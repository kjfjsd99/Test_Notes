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4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3" style:family="table">
      <style:table-properties style:width="16.51cm" fo:margin-left="0.004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25pt solid #cccccc">
        <style:background-image/>
      </style:table-cell-properties>
    </style:style>
    <style:style style:name="表格4" style:family="table">
      <style:table-properties style:width="16.51cm" fo:margin-left="0.004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5" style:family="table">
      <style:table-properties style:width="16.51cm" fo:margin-left="0.004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6" style:family="table">
      <style:table-properties style:width="16.51cm" fo:margin-left="0.00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7" style:family="table">
      <style:table-properties style:width="16.51cm" fo:margin-left="0.004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8" style:family="table">
      <style:table-properties style:width="16.51cm" fo:margin-left="0.004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9" style:family="table">
      <style:table-properties style:width="16.51cm" fo:margin-left="0.004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0" style:family="table">
      <style:table-properties style:width="16.51cm" fo:margin-left="0.004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25pt solid #1e5631">
        <style:background-image/>
      </style:table-cell-properties>
    </style:style>
    <style:style style:name="表格11" style:family="table">
      <style:table-properties style:width="16.51cm" fo:margin-left="0.004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2" style:family="table">
      <style:table-properties style:width="16.51cm" fo:margin-left="0.004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6cm"/>
    </style:style>
    <style:style style:name="表格12.D" style:family="table-column">
      <style:table-column-properties style:column-width="3.531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25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3" style:family="table">
      <style:table-properties style:width="16.51cm" fo:margin-left="0.004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6cm"/>
    </style:style>
    <style:style style:name="表格13.D" style:family="table-column">
      <style:table-column-properties style:column-width="3.531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25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4" style:family="table">
      <style:table-properties style:width="16.51cm" fo:margin-left="0.00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25pt solid #7b3f00">
        <style:background-image/>
      </style:table-cell-properties>
    </style:style>
    <style:style style:name="表格15" style:family="table">
      <style:table-properties style:width="16.51cm" fo:margin-left="0.004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6" style:family="table">
      <style:table-properties style:width="16.51cm" fo:margin-left="0.004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17" style:family="table">
      <style:table-properties style:width="16.51cm" fo:margin-left="0.004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8" style:family="table">
      <style:table-properties style:width="9.525cm" fo:margin-left="0.004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9" style:family="table">
      <style:table-properties style:width="16.51cm" fo:margin-left="0.00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0" style:family="table">
      <style:table-properties style:width="16.51cm" fo:margin-left="0.004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1" style:family="table">
      <style:table-properties style:width="16.51cm" fo:margin-left="0.004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2" style:family="table">
      <style:table-properties style:width="16.51cm" fo:margin-left="0.004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3" style:family="table">
      <style:table-properties style:width="16.51cm" fo:margin-left="0.004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4" style:family="table">
      <style:table-properties style:width="16.51cm" fo:margin-left="0.004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5" style:family="table">
      <style:table-properties style:width="16.51cm" fo:margin-left="0.004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26" style:family="table">
      <style:table-properties style:width="16.51cm" fo:margin-left="0.004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7" style:family="table">
      <style:table-properties style:width="16.51cm" fo:margin-left="0.004cm" fo:margin-top="0cm" fo:margin-bottom="0cm" table:align="left" style:writing-mode="page"/>
    </style:style>
    <style:style style:name="表格27.A" style:family="table-column">
      <style:table-column-properties style:column-width="3.171cm"/>
    </style:style>
    <style:style style:name="表格27.B" style:family="table-column">
      <style:table-column-properties style:column-width="7.691cm"/>
    </style:style>
    <style:style style:name="表格27.C" style:family="table-column">
      <style:table-column-properties style:column-width="5.648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25pt solid #cccccc">
        <style:background-image/>
      </style:table-cell-properties>
    </style:style>
    <style:style style:name="表格28" style:family="table">
      <style:table-properties style:width="16.51cm" fo:margin-left="0.004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9" style:family="table">
      <style:table-properties style:width="16.51cm" fo:margin-left="0.004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2cm"/>
    </style:style>
    <style:style style:name="表格29.C" style:family="table-column">
      <style:table-column-properties style:column-width="8.82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30" style:family="table">
      <style:table-properties style:width="16.51cm" fo:margin-left="0.004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31" style:family="table">
      <style:table-properties style:width="16.51cm" fo:margin-left="0.004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6.51cm" fo:margin-left="0.004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Heading_20_2">
      <style:paragraph-properties fo:margin-left="0cm" fo:margin-right="0cm" fo:margin-top="0.494cm" fo:margin-bottom="0.176cm" style:contextual-spacing="false" fo:text-indent="0cm" style:auto-text-indent="false"/>
    </style:style>
    <style:style style:name="P13" style:family="paragraph" style:parent-style-name="Heading_20_1">
      <style:paragraph-properties fo:margin-left="0cm" fo:margin-right="0cm" fo:margin-top="0.635cm" fo:margin-bottom="0.212cm" style:contextual-spacing="false" fo:text-indent="0cm" style:auto-text-indent="false"/>
    </style:style>
    <style:style style:name="P1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15" style:family="paragraph" style:parent-style-name="Heading_20_1">
      <style:paragraph-properties fo:margin-left="0cm" fo:margin-right="0cm" fo:margin-top="0cm" fo:margin-bottom="0.212cm" style:contextual-spacing="false" fo:text-indent="0cm" style:auto-text-indent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P1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2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1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22" style:family="paragraph" style:parent-style-name="Standard">
      <style:paragraph-properties fo:margin-top="0.071cm" fo:margin-bottom="0.018cm" style:contextual-spacing="false" fo:text-align="center" style:justify-single-word="false"/>
    </style:style>
    <style:style style:name="P23" style:family="paragraph" style:parent-style-name="Standard">
      <style:paragraph-properties fo:margin-top="0.053cm" fo:margin-bottom="0.053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5" style:family="paragraph" style:parent-style-name="Standard">
      <style:paragraph-properties fo:margin-top="0.106cm" fo:margin-bottom="0.106cm" style:contextual-spacing="false"/>
    </style:style>
    <style:style style:name="P26" style:family="paragraph" style:parent-style-name="Standard">
      <style:paragraph-properties fo:margin-top="0.071cm" fo:margin-bottom="0.071cm" style:contextual-spacing="false"/>
    </style:style>
    <style:style style:name="P27" style:family="paragraph" style:parent-style-name="Standard">
      <style:paragraph-properties fo:margin-top="0.035cm" fo:margin-bottom="0.035cm" style:contextual-spacing="false"/>
    </style:style>
    <style:style style:name="P28" style:family="paragraph" style:parent-style-name="Standard">
      <style:paragraph-properties fo:margin-top="0.071cm" fo:margin-bottom="0.035cm" style:contextual-spacing="false"/>
    </style:style>
    <style:style style:name="P29" style:family="paragraph" style:parent-style-name="Standard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P30" style:family="paragraph" style:parent-style-name="Standard">
      <style:paragraph-properties fo:margin-top="0.035cm" fo:margin-bottom="0.071cm" style:contextual-spacing="false"/>
    </style:style>
    <style:style style:name="P31" style:family="paragraph" style:parent-style-name="Standard">
      <style:paragraph-properties fo:margin-top="0cm" fo:margin-bottom="0.035cm" style:contextual-spacing="false"/>
    </style:style>
    <style:style style:name="P32" style:family="paragraph" style:parent-style-name="Standard">
      <style:paragraph-properties fo:margin-top="0.353cm" fo:margin-bottom="0.141cm" style:contextual-spacing="false"/>
    </style:style>
    <style:style style:name="P33" style:family="paragraph" style:parent-style-name="Standard">
      <style:paragraph-properties fo:margin-top="0.071cm" fo:margin-bottom="0.018cm" style:contextual-spacing="false"/>
    </style:style>
    <style:style style:name="P34" style:family="paragraph" style:parent-style-name="Standard">
      <style:paragraph-properties fo:margin-top="0cm" fo:margin-bottom="0.018cm" style:contextual-spacing="false"/>
    </style:style>
    <style:style style:name="P35" style:family="paragraph" style:parent-style-name="Standard">
      <style:paragraph-properties fo:margin-top="0cm" fo:margin-bottom="0.106cm" style:contextual-spacing="false"/>
    </style:style>
    <style:style style:name="P36" style:family="paragraph" style:parent-style-name="Standard">
      <style:paragraph-properties fo:margin-top="0.018cm" fo:margin-bottom="0.018cm" style:contextual-spacing="false"/>
    </style:style>
    <style:style style:name="P37" style:family="paragraph" style:parent-style-name="Standard">
      <style:paragraph-properties fo:margin-top="0.018cm" fo:margin-bottom="0.071cm" style:contextual-spacing="false"/>
    </style:style>
    <style:style style:name="P38" style:family="paragraph" style:parent-style-name="Standard">
      <style:paragraph-properties fo:margin-top="0.018cm" fo:margin-bottom="0.035cm" style:contextual-spacing="false"/>
    </style:style>
    <style:style style:name="P39" style:family="paragraph" style:parent-style-name="Standard">
      <style:paragraph-properties fo:margin-top="0.035cm" fo:margin-bottom="0.018cm" style:contextual-spacing="false"/>
    </style:style>
    <style:style style:name="P40" style:family="paragraph" style:parent-style-name="Standard">
      <style:paragraph-properties fo:margin-top="0cm" fo:margin-bottom="0cm" style:contextual-spacing="false" fo:break-before="page"/>
      <style:text-properties fo:color="#1a6b72" loext:opacity="100%" fo:font-size="14pt" fo:font-weight="bold" style:font-size-asian="14pt" style:font-weight-asian="bold"/>
    </style:style>
    <style:style style:name="P41" style:family="paragraph" style:parent-style-name="Standard">
      <style:text-properties fo:color="#1a6b72" loext:opacity="100%" fo:font-size="14pt" fo:font-weight="bold" style:font-size-asian="14pt" style:font-weight-asian="bold"/>
    </style:style>
    <style:style style:name="P42" style:family="paragraph" style:parent-style-name="Standard">
      <style:text-properties fo:color="#444444" loext:opacity="100%" fo:font-size="11pt" style:font-size-asian="11pt"/>
    </style:style>
    <style:style style:name="P43" style:family="paragraph" style:parent-style-name="Standard">
      <style:text-properties fo:color="#444444" loext:opacity="100%" fo:font-size="11pt" fo:font-style="italic" style:font-size-asian="11pt" style:font-style-asian="italic"/>
    </style:style>
    <style:style style:name="P44" style:family="paragraph" style:parent-style-name="Standard">
      <style:text-properties fo:color="#1f3864" loext:opacity="100%" fo:font-size="12pt" fo:font-weight="bold" style:font-size-asian="12pt" style:font-weight-asian="bold"/>
    </style:style>
    <style:style style:name="P45" style:family="paragraph" style:parent-style-name="Standard">
      <style:text-properties fo:color="#1f3864" loext:opacity="100%" style:font-name="Courier New" fo:font-size="10pt" style:font-size-asian="10pt"/>
    </style:style>
    <style:style style:name="P46" style:family="paragraph" style:parent-style-name="Standard">
      <style:text-properties fo:color="#1f3864" loext:opacity="100%" style:font-name="Courier New" fo:font-size="11pt" style:font-size-asian="11pt"/>
    </style:style>
    <style:style style:name="P47" style:family="paragraph" style:parent-style-name="Standard">
      <style:text-properties fo:color="#ff7f00" loext:opacity="100%" fo:font-size="13pt" fo:font-weight="bold" style:font-size-asian="13pt" style:font-weight-asian="bold"/>
    </style:style>
    <style:style style:name="P48" style:family="paragraph" style:parent-style-name="Standard">
      <style:paragraph-properties fo:margin-top="0.106cm" fo:margin-bottom="0.035cm" style:contextual-spacing="false"/>
    </style:style>
    <style:style style:name="P49" style:family="paragraph" style:parent-style-name="Standard">
      <style:paragraph-properties fo:margin-top="0cm" fo:margin-bottom="0.071cm" style:contextual-spacing="false"/>
    </style:style>
    <style:style style:name="T1" style:family="text">
      <style:text-properties fo:color="#ffffff" loext:opacity="100%" style:font-name="Arial" fo:font-size="24pt" fo:font-weight="bold" style:font-size-asian="24pt" style:font-weight-asian="bold" style:font-name-complex="Arial2" style:font-size-complex="24pt" style:font-weight-complex="bold"/>
    </style:style>
    <style:style style:name="T2" style:family="text">
      <style:text-properties fo:color="#ffffff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ffffff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6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7" style:family="text">
      <style:text-properties fo:color="#ffffff" loext:opacity="100%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8" style:family="text">
      <style:text-properties fo:color="#ffffff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9" style:family="text">
      <style:text-properties fo:color="#a8d8dc" loext:opacity="100%" style:font-name="Arial" fo:font-size="12pt" style:font-size-asian="12pt" style:font-name-complex="Arial2" style:font-size-complex="12pt"/>
    </style:style>
    <style:style style:name="T10" style:family="text">
      <style:text-properties fo:color="#a8d8dc" loext:opacity="100%" style:font-name="Arial" fo:font-size="12pt" style:font-name-asian="Arial2" style:font-size-asian="12pt" style:font-name-complex="Arial2" style:font-size-complex="12pt"/>
    </style:style>
    <style:style style:name="T11" style:family="text">
      <style:text-properties fo:color="#a8d8dc" loext:opacity="100%" fo:font-size="12pt" style:font-name-asian="Arial2" style:font-size-asian="12pt" style:font-name-complex="Arial2" style:font-size-complex="12pt"/>
    </style:style>
    <style:style style:name="T12" style:family="text">
      <style:text-properties fo:color="#1f3864" loext:opacity="100%" style:font-name="Arial" fo:font-size="18pt" fo:font-weight="bold" style:font-size-asian="18pt" style:font-weight-asian="bold" style:font-name-complex="Arial2" style:font-size-complex="18pt" style:font-weight-complex="bold"/>
    </style:style>
    <style:style style:name="T13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14" style:family="text">
      <style:text-properties fo:color="#1f3864" loext:opacity="100%" style:font-name="Arial" fo:font-size="18pt" fo:font-weight="bold" fo:background-color="#ffd740" loext:char-shading-value="0" style:font-name-asian="Arial2" style:font-size-asian="18pt" style:font-weight-asian="bold" style:font-name-complex="Arial2" style:font-size-complex="18pt" style:font-weight-complex="bold"/>
    </style:style>
    <style:style style:name="T15" style:family="text">
      <style:text-properties fo:color="#1f3864" loext:opacity="100%" style:font-name="Arial" fo:font-size="18pt" fo:font-weight="bold" fo:background-color="#ffd740" loext:char-shading-value="0" style:font-size-asian="18pt" style:font-weight-asian="bold" style:font-name-complex="Arial2" style:font-size-complex="18pt" style:font-weight-complex="bold"/>
    </style:style>
    <style:style style:name="T16" style:family="text">
      <style:text-properties fo:color="#1f3864" loext:opacity="100%" style:font-name="Arial" fo:font-size="18pt" fo:font-weight="bold" fo:background-color="#ffab40" loext:char-shading-value="0" style:font-size-asian="18pt" style:font-weight-asian="bold" style:font-name-complex="Arial2" style:font-size-complex="18pt" style:font-weight-complex="bold"/>
    </style:style>
    <style:style style:name="T17" style:family="text">
      <style:text-properties fo:color="#1f3864" loext:opacity="100%" style:font-name="Arial" fo:font-size="18pt" fo:font-weight="bold" fo:background-color="#ffab40" loext:char-shading-value="0" style:font-name-asian="Arial2" style:font-size-asian="18pt" style:font-weight-asian="bold" style:font-name-complex="Arial2" style:font-size-complex="18pt" style:font-weight-complex="bold"/>
    </style:style>
    <style:style style:name="T18" style:family="text">
      <style:text-properties fo:color="#1f3864" loext:opacity="100%" style:font-name="Arial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" style:family="text">
      <style:text-properties fo:color="#1f3864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21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1f3864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3" style:family="text">
      <style:text-properties fo:color="#1f38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4" style:family="text"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25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6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27" style:family="text"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T28" style:family="text">
      <style:text-properties fo:color="#1f3864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a6b7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30" style:family="text">
      <style:text-properties fo:color="#1a6b72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1" style:family="text">
      <style:text-properties fo:color="#1a6b72" loext:opacity="100%" style:font-name="Arial" fo:font-size="14pt" fo:font-weight="bold" fo:background-color="#ffff00" loext:char-shading-value="0" style:font-name-asian="Arial2" style:font-size-asian="14pt" style:font-weight-asian="bold" style:font-name-complex="Arial2" style:font-size-complex="14pt" style:font-weight-complex="bold"/>
    </style:style>
    <style:style style:name="T32" style:family="text">
      <style:text-properties fo:color="#1a6b72" loext:opacity="100%" style:font-name="Arial" fo:font-size="14pt" fo:font-weight="bold" fo:background-color="#ffd740" loext:char-shading-value="0" style:font-size-asian="14pt" style:font-weight-asian="bold" style:font-name-complex="Arial2" style:font-size-complex="14pt" style:font-weight-complex="bold"/>
    </style:style>
    <style:style style:name="T33" style:family="text">
      <style:text-properties fo:color="#1a6b72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34" style:family="text">
      <style:text-properties fo:color="#1a6b7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1a6b72" loext:opacity="100%" style:font-name="Arial" fo:font-size="10pt" style:font-size-asian="10pt" style:font-name-complex="Arial2" style:font-size-complex="10pt"/>
    </style:style>
    <style:style style:name="T36" style:family="text">
      <style:text-properties fo:color="#1a6b72" loext:opacity="100%" style:font-name="Arial" fo:font-size="10pt" style:font-name-asian="Arial2" style:font-size-asian="10pt" style:font-name-complex="Arial2" style:font-size-complex="10pt"/>
    </style:style>
    <style:style style:name="T37" style:family="text">
      <style:text-properties fo:color="#1a6b72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8" style:family="text">
      <style:text-properties fo:color="#1a6b7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9" style:family="text">
      <style:text-properties fo:color="#1a6b72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40" style:family="text">
      <style:text-properties fo:color="#1a6b7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1" style:family="text">
      <style:text-properties fo:color="#1a6b72" loext:opacity="100%" fo:font-size="10pt" style:font-name-asian="Arial2" style:font-size-asian="10pt" style:font-name-complex="Arial2" style:font-size-complex="10pt"/>
    </style:style>
    <style:style style:name="T42" style:family="text">
      <style:text-properties fo:color="#1a6b72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3" style:family="text">
      <style:text-properties fo:color="#1a6b72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4" style:family="text">
      <style:text-properties fo:color="#1a6b72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5" style:family="text">
      <style:text-properties fo:color="#444444" loext:opacity="100%" style:font-name="Arial" fo:font-size="11pt" style:font-size-asian="11pt" style:font-name-complex="Arial2" style:font-size-complex="11pt"/>
    </style:style>
    <style:style style:name="T46" style:family="text">
      <style:text-properties fo:color="#444444" loext:opacity="100%" style:font-name="Arial" fo:font-size="11pt" style:font-name-asian="Arial2" style:font-size-asian="11pt" style:font-name-complex="Arial2" style:font-size-complex="11pt"/>
    </style:style>
    <style:style style:name="T47" style:family="text">
      <style:text-properties fo:color="#4444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8" style:family="text">
      <style:text-properties fo:color="#444444" loext:opacity="100%" style:font-name="Arial" fo:font-size="11pt" fo:font-weight="bold" fo:background-color="#ffd740" loext:char-shading-value="0" style:font-size-asian="11pt" style:font-weight-asian="bold" style:font-name-complex="Arial2" style:font-size-complex="11pt" style:font-weight-complex="bold"/>
    </style:style>
    <style:style style:name="T49" style:family="text">
      <style:text-properties fo:color="#444444" loext:opacity="100%" style:font-name="Arial" fo:font-size="11pt" fo:font-weight="bold" fo:background-color="#c6ff00" loext:char-shading-value="0" style:font-size-asian="11pt" style:font-weight-asian="bold" style:font-name-complex="Arial2" style:font-size-complex="11pt" style:font-weight-complex="bold"/>
    </style:style>
    <style:style style:name="T50" style:family="text">
      <style:text-properties fo:color="#444444" loext:opacity="100%" style:font-name="Arial" fo:font-size="11pt" fo:font-weight="bold" fo:background-color="#b2ff59" loext:char-shading-value="0" style:font-size-asian="11pt" style:font-weight-asian="bold" style:font-name-complex="Arial2" style:font-size-complex="11pt" style:font-weight-complex="bold"/>
    </style:style>
    <style:style style:name="T51" style:family="text">
      <style:text-properties fo:color="#444444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52" style:family="text"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3" style:family="text">
      <style:text-properties fo:color="#444444" loext:opacity="100%" style:font-name="Arial" fo:font-size="10pt" style:font-size-asian="10pt" style:font-name-complex="Arial2" style:font-size-complex="10pt"/>
    </style:style>
    <style:style style:name="T54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T55" style:family="text">
      <style:text-properties fo:color="#444444" loext:opacity="100%" style:font-name="Arial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56" style:family="text">
      <style:text-properties fo:color="#444444" loext:opacity="100%" style:font-name="Arial" fo:font-size="10pt" fo:font-weight="bold" fo:background-color="#ffd740" loext:char-shading-value="0" style:font-size-asian="10pt" style:font-weight-asian="bold" style:font-name-complex="Arial2" style:font-size-complex="10pt" style:font-weight-complex="bold"/>
    </style:style>
    <style:style style:name="T57" style:family="text">
      <style:text-properties fo:color="#4444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58" style:family="text">
      <style:text-properties fo:color="#444444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59" style:family="text">
      <style:text-properties fo:color="#444444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60" style:family="text">
      <style:text-properties fo:color="#444444" loext:opacity="100%" style:font-name="Arial" fo:font-size="9pt" fo:font-weight="normal" style:font-size-asian="9pt" style:font-weight-asian="normal" style:font-name-complex="Arial2" style:font-size-complex="9pt" style:font-weight-complex="normal"/>
    </style:style>
    <style:style style:name="T61" style:family="text"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T62" style:family="text">
      <style:text-properties fo:color="#444444" loext:opacity="100%" style:font-name="Arial" fo:font-size="9pt" style:font-size-asian="9pt" style:font-name-complex="Arial2" style:font-size-complex="9pt"/>
    </style:style>
    <style:style style:name="T63" style:family="text">
      <style:text-properties fo:color="#444444" loext:opacity="100%" fo:font-size="11pt" style:font-name-asian="Arial2" style:font-size-asian="11pt" style:font-name-complex="Arial2" style:font-size-complex="11pt"/>
    </style:style>
    <style:style style:name="T64" style:family="text">
      <style:text-properties fo:color="#444444" loext:opacity="100%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65" style:family="text">
      <style:text-properties fo:color="#444444" loext:opacity="100%" fo:font-size="11pt" fo:font-weight="bold" fo:background-color="#c6ff00" loext:char-shading-value="0" style:font-name-asian="Arial2" style:font-size-asian="11pt" style:font-weight-asian="bold" style:font-name-complex="Arial2" style:font-size-complex="11pt" style:font-weight-complex="bold"/>
    </style:style>
    <style:style style:name="T66" style:family="text">
      <style:text-properties fo:color="#4444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7" style:family="text"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68" style:family="text">
      <style:text-properties fo:color="#444444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69" style:family="text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T70" style:family="text">
      <style:text-properties fo:color="#4444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1" style:family="text">
      <style:text-properties fo:color="#444444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2" style:family="text">
      <style:text-properties fo:color="#44444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73" style:family="text">
      <style:text-properties fo:color="#444444" loext:opacity="100%" fo:font-size="10pt" style:font-name-asian="Arial2" style:font-size-asian="10pt" style:font-name-complex="Arial2" style:font-size-complex="10pt"/>
    </style:style>
    <style:style style:name="T74" style:family="text">
      <style:text-properties fo:color="#444444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75" style:family="text">
      <style:text-properties fo:color="#4444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76" style:family="text">
      <style:text-properties fo:color="#444444" loext:opacity="100%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77" style:family="text">
      <style:text-properties fo:color="#444444" loext:opacity="100%" fo:font-size="9pt" style:font-name-asian="Arial2" style:font-size-asian="9pt" style:font-name-complex="Arial2" style:font-size-complex="9pt"/>
    </style:style>
    <style:style style:name="T78" style:family="text">
      <style:text-properties fo:color="#c9211e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79" style:family="text">
      <style:text-properties fo:color="#c9211e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80" style:family="text">
      <style:text-properties fo:color="#ff3d00" loext:opacity="100%" style:font-name="Arial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81" style:family="text">
      <style:text-properties fo:color="#ff3d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82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83" style:family="text">
      <style:text-properties fo:color="#ff3d00" loext:opacity="100%" style:font-name="Arial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4" style:family="text">
      <style:text-properties fo:color="#ff3d00" loext:opacity="100%" style:font-name="Arial" fo:font-size="13pt" fo:font-weight="bold" fo:background-color="#64ffda" loext:char-shading-value="0" style:font-size-asian="13pt" style:font-weight-asian="bold" style:font-name-complex="Arial2" style:font-size-complex="13pt" style:font-weight-complex="bold"/>
    </style:style>
    <style:style style:name="T85" style:family="text">
      <style:text-properties fo:color="#ff3d00" loext:opacity="100%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86" style:family="text">
      <style:text-properties fo:color="#ff3d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87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8" style:family="text">
      <style:text-properties fo:color="#ff3d00" loext:opacity="100%" style:font-name="Courier New" fo:font-size="10pt" fo:font-weight="bold" fo:background-color="#64ffda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89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0" style:family="text">
      <style:text-properties fo:color="#ff3d00" loext:opacity="100%" fo:font-size="9pt" fo:font-weight="bold" fo:background-color="#64ffda" loext:char-shading-value="0" style:font-name-asian="Arial2" style:font-size-asian="9pt" style:font-weight-asian="bold" style:font-name-complex="Arial2" style:font-size-complex="9pt" style:font-weight-complex="bold"/>
    </style:style>
    <style:style style:name="T91" style:family="text">
      <style:text-properties fo:color="#18ffff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2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3" style:family="text">
      <style:text-properties fo:color="#18ffff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94" style:family="text">
      <style:text-properties fo:color="#18ffff" loext:opacity="100%" fo:font-size="10pt" fo:font-weight="bold" fo:background-color="#e040fb" loext:char-shading-value="0" style:font-name-asian="Arial2" style:font-size-asian="10pt" style:font-weight-asian="bold" style:font-name-complex="Arial2" style:font-size-complex="10pt" style:font-weight-complex="bold"/>
    </style:style>
    <style:style style:name="T95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96" style:family="text">
      <style:text-properties fo:color="#18ffff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97" style:family="text">
      <style:text-properties fo:color="#18ffff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98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99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0" style:family="text">
      <style:text-properties fo:color="#18ffff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01" style:family="text">
      <style:text-properties fo:color="#18ffff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02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3" style:family="text">
      <style:text-properties fo:color="#18ffff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4" style:family="text">
      <style:text-properties fo:color="#18ffff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5" style:family="text">
      <style:text-properties fo:color="#18ffff" loext:opacity="100%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06" style:family="text">
      <style:text-properties fo:color="#e040fb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e040fb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08" style:family="text">
      <style:text-properties fo:color="#7b3f00" loext:opacity="100%" fo:font-size="11pt" style:font-name-asian="Arial2" style:font-size-asian="11pt" style:font-name-complex="Arial2" style:font-size-complex="11pt"/>
    </style:style>
    <style:style style:name="T109" style:family="text">
      <style:text-properties fo:color="#7b3f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0" style:family="text">
      <style:text-properties fo:color="#7b3f00" loext:opacity="100%" style:font-name="Arial" fo:font-size="11pt" style:font-size-asian="11pt" style:font-name-complex="Arial2" style:font-size-complex="11pt"/>
    </style:style>
    <style:style style:name="T111" style:family="text">
      <style:text-properties fo:color="#7b3f00" loext:opacity="100%" style:font-name="Arial" fo:font-size="11pt" style:font-name-asian="Arial2" style:font-size-asian="11pt" style:font-name-complex="Arial2" style:font-size-complex="11pt"/>
    </style:style>
    <style:style style:name="T112" style:family="text">
      <style:text-properties fo:color="#7b3f00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13" style:family="text">
      <style:text-properties fo:color="#7b3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4" style:family="text">
      <style:text-properties fo:color="#7b3f00" loext:opacity="100%" style:font-name="Arial" fo:font-size="10pt" style:font-size-asian="10pt" style:font-name-complex="Arial2" style:font-size-complex="10pt"/>
    </style:style>
    <style:style style:name="T115" style:family="text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T116" style:family="text">
      <style:text-properties fo:color="#7b3f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7" style:family="text">
      <style:text-properties fo:color="#7b3f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18" style:family="text">
      <style:text-properties fo:color="#7b3f00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19" style:family="text">
      <style:text-properties fo:color="#7b3f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0" style:family="text">
      <style:text-properties fo:color="#7b3f00" loext:opacity="100%" fo:font-size="10pt" style:font-name-asian="Arial2" style:font-size-asian="10pt" style:font-name-complex="Arial2" style:font-size-complex="10pt"/>
    </style:style>
    <style:style style:name="T121" style:family="text">
      <style:text-properties fo:color="#7b3f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2" style:family="text">
      <style:text-properties fo:color="#7b3f00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3" style:family="text">
      <style:text-properties fo:color="#7b3f00" loext:opacity="100%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24" style:family="text">
      <style:text-properties fo:color="#ff17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25" style:family="text">
      <style:text-properties fo:color="#ff17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26" style:family="text">
      <style:text-properties fo:color="#ff17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27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8" style:family="text">
      <style:text-properties fo:color="#ff17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29" style:family="text">
      <style:text-properties fo:color="#1e5631" loext:opacity="100%" fo:font-size="10pt" style:font-name-asian="Arial2" style:font-size-asian="10pt" style:font-name-complex="Arial2" style:font-size-complex="10pt"/>
    </style:style>
    <style:style style:name="T130" style:family="text">
      <style:text-properties fo:color="#1e5631" loext:opacity="100%" style:font-name="Arial" fo:font-size="10pt" style:font-size-asian="10pt" style:font-name-complex="Arial2" style:font-size-complex="10pt"/>
    </style:style>
    <style:style style:name="T131" style:family="text">
      <style:text-properties fo:color="#1e5631" loext:opacity="100%" style:font-name="Arial" fo:font-size="10pt" style:font-name-asian="Arial2" style:font-size-asian="10pt" style:font-name-complex="Arial2" style:font-size-complex="10pt"/>
    </style:style>
    <style:style style:name="T132" style:family="text">
      <style:text-properties fo:color="#1e5631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33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4" style:family="text">
      <style:text-properties fo:color="#1e5631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135" style:family="text">
      <style:text-properties fo:color="#1e5631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36" style:family="text">
      <style:text-properties fo:color="#1e5631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7" style:family="text"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T138" style:family="text"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139" style:family="text">
      <style:text-properties fo:color="#1e5631" loext:opacity="100%" style:font-name="Courier New" fo:font-size="11pt" fo:font-weight="bold" fo:background-color="#ffff0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40" style:family="text">
      <style:text-properties fo:color="#1e5631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1" style:family="text">
      <style:text-properties fo:color="#ffd740" loext:opacity="100%" style:font-name="Arial" fo:font-size="10pt" fo:font-weight="bold" fo:background-color="#ff1744" loext:char-shading-value="0" style:font-size-asian="10pt" style:font-weight-asian="bold" style:font-name-complex="Arial2" style:font-size-complex="10pt" style:font-weight-complex="bold"/>
    </style:style>
    <style:style style:name="T142" style:family="text">
      <style:text-properties fo:color="#ffd74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43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44" style:family="text">
      <style:text-properties fo:color="#ffff00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45" style:family="text">
      <style:text-properties fo:color="#ffff00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46" style:family="text">
      <style:text-properties fo:color="#ffff00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47" style:family="text">
      <style:text-properties fo:color="#ffff00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48" style:family="text">
      <style:text-properties fo:color="#ffff0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49" style:family="text">
      <style:text-properties fo:color="#ffff00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50" style:family="text">
      <style:text-properties fo:color="#ffff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51" style:family="text">
      <style:text-properties fo:color="#ffff00" loext:opacity="100%" style:font-name="Courier New" fo:font-size="11pt" fo:font-weight="bold" fo:background-color="#ef535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52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3" style:family="text">
      <style:text-properties fo:color="#76ff03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54" style:family="text">
      <style:text-properties fo:color="#76ff03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55" style:family="text">
      <style:text-properties fo:color="#76ff03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56" style:family="text">
      <style:text-properties fo:color="#76ff03" loext:opacity="100%" style:font-name="Arial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57" style:family="text">
      <style:text-properties fo:color="#76ff03" loext:opacity="100%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58" style:family="text">
      <style:text-properties fo:color="#76ff03" loext:opacity="100%" fo:font-size="9pt" fo:font-weight="bold" fo:background-color="#3d5afe" loext:char-shading-value="0" style:font-name-asian="Arial2" style:font-size-asian="9pt" style:font-weight-asian="bold" style:font-name-complex="Arial2" style:font-size-complex="9pt" style:font-weight-complex="bold"/>
    </style:style>
    <style:style style:name="T159" style:family="text">
      <style:text-properties fo:color="#8b0000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60" style:family="text">
      <style:text-properties fo:color="#8b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61" style:family="text">
      <style:text-properties fo:color="#8b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2" style:family="text">
      <style:text-properties fo:color="#8b0000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63" style:family="text">
      <style:text-properties fo:color="#8b00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4" style:family="text"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165" style:family="text">
      <style:text-properties fo:color="#eeff41" loext:opacity="100%" style:font-name="Arial" fo:font-size="13pt" fo:font-weight="bold" fo:background-color="#3d5afe" loext:char-shading-value="0" style:font-size-asian="13pt" style:font-weight-asian="bold" style:font-name-complex="Arial2" style:font-size-complex="13pt" style:font-weight-complex="bold"/>
    </style:style>
    <style:style style:name="T166" style:family="text">
      <style:text-properties fo:color="#ff4081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67" style:family="text">
      <style:text-properties fo:color="#ff4081" loext:opacity="100%" style:font-name="Arial" fo:font-size="11pt" fo:font-weight="bold" fo:background-color="#ffffff" loext:char-shading-value="0" style:font-size-asian="11pt" style:font-weight-asian="bold" style:font-name-complex="Arial2" style:font-size-complex="11pt" style:font-weight-complex="bold"/>
    </style:style>
    <style:style style:name="T168" style:family="text">
      <style:text-properties fo:color="#ff4081" loext:opacity="100%" fo:font-size="11pt" fo:font-weight="bold" fo:background-color="#ffffff" loext:char-shading-value="0" style:font-name-asian="Arial2" style:font-size-asian="11pt" style:font-weight-asian="bold" style:font-name-complex="Arial2" style:font-size-complex="11pt" style:font-weight-complex="bold"/>
    </style:style>
    <style:style style:name="T169" style:family="text">
      <style:text-properties fo:color="#00e676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70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71" style:family="text">
      <style:text-properties fo:color="#eeeeee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72" style:family="text">
      <style:text-properties fo:color="#eeeeee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73" style:family="text">
      <style:text-properties fo:color="#ffc400" loext:opacity="100%" style:font-name="Courier New" fo:font-size="10pt" fo:font-weight="bold" fo:background-color="#0000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74" style:family="text">
      <style:text-properties fo:color="#ff5252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75" style:family="text">
      <style:text-properties fo:color="#ff5252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76" style:family="text">
      <style:text-properties fo:color="#c6ff00" loext:opacity="100%" style:font-name="Arial" fo:font-size="10pt" fo:font-weight="bold" fo:background-color="#651fff" loext:char-shading-value="0" style:font-size-asian="10pt" style:font-weight-asian="bold" style:font-name-complex="Arial2" style:font-size-complex="10pt" style:font-weight-complex="bold"/>
    </style:style>
    <style:style style:name="T177" style:family="text">
      <style:text-properties fo:color="#c6ff00" loext:opacity="100%" fo:font-size="10pt" fo:font-weight="bold" fo:background-color="#651fff" loext:char-shading-value="0" style:font-name-asian="Arial2" style:font-size-asian="10pt" style:font-weight-asian="bold" style:font-name-complex="Arial2" style:font-size-complex="10pt" style:font-weight-complex="bold"/>
    </style:style>
    <style:style style:name="T178" style:family="text">
      <style:text-properties fo:color="#f50057" loext:opacity="100%" style:font-name="Arial" fo:font-size="9pt" fo:font-weight="bold" fo:background-color="#ffff00" loext:char-shading-value="0" style:font-size-asian="9pt" style:font-weight-asian="bold" style:font-name-complex="Arial2" style:font-size-complex="9pt" style:font-weight-complex="bold"/>
    </style:style>
    <style:style style:name="T179" style:family="text">
      <style:text-properties fo:color="#f50057" loext:opacity="100%" fo:font-size="9pt" fo:font-weight="bold" fo:background-color="#ffff00" loext:char-shading-value="0" style:font-name-asian="Arial2" style:font-size-asian="9pt" style:font-weight-asian="bold" style:font-name-complex="Arial2" style:font-size-complex="9pt" style:font-weight-complex="bold"/>
    </style:style>
    <style:style style:name="T180" style:family="text">
      <style:text-properties fo:color="#ff91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181" style:family="text">
      <style:text-properties fo:color="#ff9100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82" style:family="text">
      <style:text-properties fo:color="#ff91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183" style:family="text">
      <style:text-properties fo:color="#ff9100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84" style:family="text">
      <style:text-properties fo:color="#b2ff59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85" style:family="text">
      <style:text-properties fo:color="#b2ff59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86" style:family="text">
      <style:text-properties fo:color="#b2ff59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7" style:family="text">
      <style:text-properties fo:color="#ff6e40" loext:opacity="100%" style:font-name="Courier New" fo:font-size="9pt" fo:font-weight="bold" fo:background-color="#3e272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8" style:family="text">
      <style:text-properties fo:color="#d500f9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9" style:family="text">
      <style:text-properties fo:color="#b71c1c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0" style:family="text">
      <style:text-properties fo:color="#c62828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91" style:family="text">
      <style:text-properties fo:color="#c62828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92" style:family="text">
      <style:text-properties fo:color="#c62828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6" loext:marker-style-name="T2"><text:span text:style-name="T1">運算式樹 </text:span><text:span text:style-name="T7">Expression Tree</text:span></text:p>
            <text:p text:style-name="P17" loext:marker-style-name="T10"><text:span text:style-name="T9">資訊類考試完整筆記 </text:span><text:span text:style-name="T11">· </text:span><text:span text:style-name="T9">從零開始到考試必勝</text:span></text:p>
          </table:table-cell>
        </table:table-row>
      </table:table>
      <text:p text:style-name="P1"/>
      <text:h text:style-name="P13" text:outline-level="1" loext:marker-style-name="T13"><text:span text:style-name="T12">第一部分：基本定義</text:span><text:span text:style-name="T13"/></text:h>
      <text:p text:style-name="P2"/>
      <text:h text:style-name="P12" text:outline-level="2" loext:marker-style-name="T30"><text:span text:style-name="T29">什麼是運算式樹 </text:span><text:span text:style-name="T30">(Expression Tree)</text:span><text:span text:style-name="T29">？</text:span></text:h>
      <text:p text:style-name="P25" loext:marker-style-name="T46"><text:span text:style-name="T45">運算式樹是一種特殊的二元樹，用來表示算術或邏輯運算式。它把整個算式的結構以樹狀方式呈現，讓電腦能清楚理解每一個運算的先後順序。</text:span><text:span text:style-name="T46"/>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" loext:marker-style-name="T34"><text:span text:style-name="T33">核心規則（考試必記）</text:span><text:span text:style-name="T34"/></text:p>
            <text:p text:style-name="P5" loext:marker-style-name="T46"><text:span text:style-name="T63">• </text:span><text:span text:style-name="T78">葉節點 </text:span><text:span text:style-name="T79">(Leaf Node)</text:span><text:span text:style-name="T78">：存放 運算元 </text:span><text:span text:style-name="T79">(Operand)</text:span><text:span text:style-name="T45">，例如 </text:span><text:span text:style-name="T63">A</text:span><text:span text:style-name="T45">、</text:span><text:span text:style-name="T63">B</text:span><text:span text:style-name="T45">、</text:span><text:span text:style-name="T63">3</text:span><text:span text:style-name="T45">、</text:span><text:span text:style-name="T63">5</text:span></text:p>
            <text:p text:style-name="P5" loext:marker-style-name="T46"><text:span text:style-name="T63">• </text:span><text:span text:style-name="T80">內部節點 </text:span><text:span text:style-name="T85">(Internal Node)</text:span><text:span text:style-name="T80">：存放 運算子 </text:span><text:span text:style-name="T85">(Operator)</text:span><text:span text:style-name="T45">，例如 </text:span><text:span text:style-name="T63">+</text:span><text:span text:style-name="T45">、</text:span><text:span text:style-name="T63">-</text:span><text:span text:style-name="T45">、</text:span><text:span text:style-name="T63">×</text:span><text:span text:style-name="T45">、</text:span><text:span text:style-name="T63">÷</text:span></text:p>
            <text:p text:style-name="P5" loext:marker-style-name="T46"><text:span text:style-name="T63">•</text:span><text:span text:style-name="T91"> </text:span><text:span text:style-name="T106">通常是 </text:span><text:span text:style-name="T107">Full Binary Tree</text:span><text:span text:style-name="T45">（每個節點恰好有 </text:span><text:span text:style-name="T63">0 </text:span><text:span text:style-name="T45">或 </text:span><text:span text:style-name="T63">2 </text:span><text:span text:style-name="T45">個子節點）</text:span></text:p>
            <text:p text:style-name="P5" loext:marker-style-name="T111"><text:span text:style-name="T108">• </text:span><text:span text:style-name="T110">若允許一元運算子（如 </text:span><text:span text:style-name="T108">sin</text:span><text:span text:style-name="T110">、</text:span><text:span text:style-name="T108">sqrt</text:span><text:span text:style-name="T110">），則不一定是 </text:span><text:span text:style-name="T108">Full Binary Tree</text:span></text:p>
          </table:table-cell>
        </table:table-row>
      </table:table>
      <text:p text:style-name="P6"/>
      <text:h text:style-name="P12" text:outline-level="2" loext:marker-style-name="T30"><text:span text:style-name="T29">範例：</text:span><text:span text:style-name="T30">(A+B)×C </text:span><text:span text:style-name="T29">的運算式樹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8" loext:marker-style-name="T24"><text:span text:style-name="T24"><text:s text:c="7"/>×</text:span><text:span text:style-name="T24"/></text:p>
            <text:p text:style-name="P19" loext:marker-style-name="T25"><text:span text:style-name="T25"><text:s text:c="6"/>/ \</text:span><text:span text:style-name="T25"/></text:p>
            <text:p text:style-name="P19" loext:marker-style-name="T25"><text:span text:style-name="T25"><text:s text:c="25"/>+ <text:s text:c="2"/>C <text:s text:c="3"/>← 葉節點（運算元）</text:span><text:span text:style-name="T25"/></text:p>
            <text:p text:style-name="P20" loext:marker-style-name="T25"><text:span text:style-name="T25"><text:s text:c="4"/>/ \</text:span><text:span text:style-name="T25"/></text:p>
            <text:p text:style-name="P20" loext:marker-style-name="T25"><text:span text:style-name="T25"><text:s text:c="22"/>A <text:s text:c="2"/>B <text:s/>← 葉節點（運算元）</text:span><text:span text:style-name="T25"/></text:p>
            <text:p text:style-name="P7" loext:marker-style-name="T36"><text:span text:style-name="T124">× </text:span><text:span text:style-name="T125">和 </text:span><text:span text:style-name="T124">+ </text:span><text:span text:style-name="T125">是內部節點（運算子）</text:span><text:span text:style-name="T35">；</text:span><text:span text:style-name="T87">A</text:span><text:span text:style-name="T82">、</text:span><text:span text:style-name="T87">B</text:span><text:span text:style-name="T82">、</text:span><text:span text:style-name="T87">C </text:span><text:span text:style-name="T82">是葉節點（運算元）</text:span></text:p>
          </table:table-cell>
        </table:table-row>
      </table:table>
      <text:p text:style-name="P6"/>
      <text:p text:style-name="Standard"/>
      <text:h text:style-name="P14" text:outline-level="1" loext:marker-style-name="T13"><text:span text:style-name="T12">第二部分：三種走訪方式（</text:span><text:span text:style-name="T13">Traversal</text:span><text:span text:style-name="T12">）</text:span></text:h>
      <text:p text:style-name="P2"/>
      <text:p text:style-name="P25" loext:marker-style-name="T46"><text:span text:style-name="T45">這是 </text:span><text:span text:style-name="T63">Expression Tree </text:span><text:span text:style-name="T45">最核心的考點。三種走訪方式，對應三種不同的運算式表示法：</text:span>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Standard" loext:marker-style-name="T4"><text:span text:style-name="T3">走訪方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順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對應表示法</text:span><text:span text:style-name="T4"/></text:p>
          </table:table-cell>
          <table:table-cell table:style-name="表格4.A1" office:value-type="string">
            <text:p text:style-name="Standard" loext:marker-style-name="T4"><text:span text:style-name="T3">說明</text:span><text:span text:style-name="T4"/></text:p>
          </table:table-cell>
        </table:table-row>
        <table:table-row table:style-name="表格4.1">
          <table:table-cell table:style-name="表格4.A2" office:value-type="string">
            <text:p text:style-name="Standard" loext:marker-style-name="T131"><text:span text:style-name="T129">Preorder</text:span><text:span text:style-name="T130">（</text:span><text:span text:style-name="T141">前序</text:span><text:span text:style-name="T130">）</text:span></text:p>
          </table:table-cell>
          <table:table-cell table:style-name="表格4.A2" office:value-type="string">
            <text:p text:style-name="Standard" loext:marker-style-name="T144"><text:span text:style-name="T143">根 → 左 → 右</text:span><text:span text:style-name="T144"/></text:p>
          </table:table-cell>
          <table:table-cell table:style-name="表格4.A2" office:value-type="string">
            <text:p text:style-name="Standard" loext:marker-style-name="T131"><text:span text:style-name="T94">Pre</text:span><text:span text:style-name="T129">fix</text:span><text:span text:style-name="T130">（前置表示法）</text:span></text:p>
          </table:table-cell>
          <table:table-cell table:style-name="表格4.A2" office:value-type="string">
            <text:p text:style-name="Standard" loext:marker-style-name="T131"><text:span text:style-name="T130">第一個元素就是根</text:span><text:span text:style-name="T131"/></text:p>
          </table:table-cell>
        </table:table-row>
        <table:table-row table:style-name="表格4.1">
          <table:table-cell table:style-name="表格4.A3" office:value-type="string">
            <text:p text:style-name="Standard" loext:marker-style-name="T115"><text:span text:style-name="T120">Inorder</text:span><text:span text:style-name="T114">（</text:span><text:span text:style-name="T141">中序</text:span><text:span text:style-name="T114">）</text:span></text:p>
          </table:table-cell>
          <table:table-cell table:style-name="表格4.A3" office:value-type="string">
            <text:p text:style-name="Standard" loext:marker-style-name="T154"><text:span text:style-name="T153">左 → 根 → 右</text:span><text:span text:style-name="T154"/></text:p>
          </table:table-cell>
          <table:table-cell table:style-name="表格4.A3" office:value-type="string">
            <text:p text:style-name="Standard" loext:marker-style-name="T115"><text:span text:style-name="T94">In</text:span><text:span text:style-name="T120">fix</text:span><text:span text:style-name="T114">（中置表示法）</text:span></text:p>
          </table:table-cell>
          <table:table-cell table:style-name="表格4.A3" office:value-type="string">
            <text:p text:style-name="P29" loext:marker-style-name="T115"/>
          </table:table-cell>
        </table:table-row>
        <table:table-row table:style-name="表格4.1">
          <table:table-cell table:style-name="表格4.A4" office:value-type="string">
            <text:p text:style-name="Standard" loext:marker-style-name="T36"><text:span text:style-name="T41">Postorder</text:span><text:span text:style-name="T35">（</text:span><text:span text:style-name="T141">後序</text:span><text:span text:style-name="T35">）</text:span></text:p>
          </table:table-cell>
          <table:table-cell table:style-name="表格4.A4" office:value-type="string">
            <text:p text:style-name="Standard" loext:marker-style-name="T97"><text:span text:style-name="T96">左 → 右 → 根</text:span><text:span text:style-name="T97"/></text:p>
          </table:table-cell>
          <table:table-cell table:style-name="表格4.A4" office:value-type="string">
            <text:p text:style-name="Standard" loext:marker-style-name="T36"><text:span text:style-name="T94">Post</text:span><text:span text:style-name="T41">fix</text:span><text:span text:style-name="T35">（後置表示法）</text:span></text:p>
          </table:table-cell>
          <table:table-cell table:style-name="表格4.A4" office:value-type="string">
            <text:p text:style-name="Standard" loext:marker-style-name="T36"><text:span text:style-name="T35">最後才記錄根節點</text:span><text:span text:style-name="T36"/></text:p>
          </table:table-cell>
        </table:table-row>
      </table:table>
      <text:p text:style-name="P6"/>
      <text:h text:style-name="P12" text:outline-level="2" loext:marker-style-name="T30"><text:span text:style-name="T29">記憶口訣（考試當場不忘）</text:span><text:span text:style-name="T30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" loext:marker-style-name="T133"><text:span text:style-name="T136">Preorder</text:span><text:span text:style-name="T132">（前序）：進房間立刻簽到 → 先記根，再走左右</text:span></text:p>
            <text:p text:style-name="P5" loext:marker-style-name="T113"><text:span text:style-name="T109">Inorder</text:span><text:span text:style-name="T112">（中序）：先進左房間，才簽到，再進右房間</text:span></text:p>
            <text:p text:style-name="P9" loext:marker-style-name="T34"><text:span text:style-name="T43">Postorder</text:span><text:span text:style-name="T33">（後序）：所有房間都查完，最後才簽退 → 根最後記錄</text:span></text:p>
          </table:table-cell>
        </table:table-row>
      </table:table>
      <text:p text:style-name="P6"/>
      <text:h text:style-name="P12" text:outline-level="2" loext:marker-style-name="T30"><text:span text:style-name="T29">重要注意事項：</text:span><text:span text:style-name="T30">Inorder </text:span><text:span text:style-name="T29">與原式的差異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" loext:marker-style-name="T160"><text:span text:style-name="T159">「中序走訪 </text:span><text:span text:style-name="T162">= </text:span><text:span text:style-name="T159">原始算式」這個說法並不完全準確！</text:span></text:p>
            <text:p text:style-name="P5" loext:marker-style-name="T46"><text:span text:style-name="T45">範例：樹的根為 </text:span><text:span text:style-name="T63">×</text:span><text:span text:style-name="T45">，左子樹為 </text:span><text:span text:style-name="T63">(A+B)</text:span><text:span text:style-name="T45">，右子樹為 </text:span><text:span text:style-name="T63">C</text:span></text:p>
            <text:p text:style-name="P5" loext:marker-style-name="T164"><text:span text:style-name="T164">中序走訪結果：A+B×C（少了括號！）</text:span><text:span text:style-name="T164"/></text:p>
            <text:p text:style-name="P9" loext:marker-style-name="T137"><text:span text:style-name="T137">原始算式應為：(A+B)×C（有括號才正確）</text:span><text:span text:style-name="T137"/></text:p>
            <text:p text:style-name="P31" loext:marker-style-name="T46"><text:span text:style-name="T45">結論：</text:span><text:span text:style-name="T100">中序走訪還原原式時，必要時需補上括號</text:span><text:span text:style-name="T45">，考試要特別留意。</text:span></text:p>
          </table:table-cell>
        </table:table-row>
      </table:table>
      <text:p text:style-name="Standard"/>
      <text:h text:style-name="P14" text:outline-level="1" loext:marker-style-name="T13"><text:span text:style-name="T12">第三部分：如何建立 </text:span><text:span text:style-name="T13">Expression Tree</text:span><text:span text:style-name="T12">（從算式長出樹）</text:span></text:h>
      <text:p text:style-name="P2"/>
      <text:p text:style-name="P25" loext:marker-style-name="T46"><text:span text:style-name="T45">核心原則只有一句：</text:span><text:span text:style-name="T46"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 loext:marker-style-name="T19"><text:span text:style-name="T18">「</text:span><text:span text:style-name="T165">找最後執行的運算子</text:span><text:span text:style-name="T18">，</text:span><text:span text:style-name="T84">它就是目前子樹的根節點</text:span><text:span text:style-name="T18">。」</text:span></text:p>
          </table:table-cell>
        </table:table-row>
      </table:table>
      <text:p text:style-name="P6"/>
      <text:h text:style-name="P12" text:outline-level="2" loext:marker-style-name="T30"><text:span text:style-name="T30">112</text:span><text:span text:style-name="T29">題實戰：</text:span><text:span text:style-name="T31">A/B-C+D×E-A×C</text:span><text:span text:style-name="T30"> → </text:span><text:span text:style-name="T29">建樹步驟</text:span></text:h>
      <text:p text:style-name="P25" loext:marker-style-name="T24"><text:span text:style-name="T24">原式：A/B-C+D×E-A×C</text:span><text:span text:style-name="T24"/>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 loext:marker-style-name="T4"><text:span text:style-name="T3">步驟</text:span><text:span text:style-name="T4"/></text:p>
          </table:table-cell>
          <table:table-cell table:style-name="表格8.A1" office:value-type="string">
            <text:p text:style-name="Standard" loext:marker-style-name="T4"><text:span text:style-name="T3">重點問題</text:span><text:span text:style-name="T4"/></text:p>
          </table:table-cell>
          <table:table-cell table:style-name="表格8.A1" office:value-type="string">
            <text:p text:style-name="Standard" loext:marker-style-name="T4"><text:span text:style-name="T3">說明與結果</text:span><text:span text:style-name="T4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2">1</text:span></text:p>
          </table:table-cell>
          <table:table-cell table:style-name="表格8.A2" office:value-type="string">
            <text:p text:style-name="P5" loext:marker-style-name="T52"><text:span text:style-name="T98">找高優先權運算</text:span><text:span text:style-name="T51">（</text:span><text:span text:style-name="T166">乘除先</text:span><text:span text:style-name="T51">）</text:span></text:p>
          </table:table-cell>
          <table:table-cell table:style-name="表格8.A2" office:value-type="string">
            <text:p text:style-name="P5" loext:marker-style-name="T67"><text:span text:style-name="T67">圈出：</text:span><text:span text:style-name="T169">(A/B)</text:span><text:span text:style-name="T67">、</text:span><text:span text:style-name="T169">(D×E)</text:span><text:span text:style-name="T67">、</text:span><text:span text:style-name="T169">(A×C)</text:span></text:p>
            <text:p text:style-name="P5" loext:marker-style-name="T67"><text:span text:style-name="T67">整理：(A/B)-C+(D×E)-(A×C)</text:span><text:span text:style-name="T67"/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2">2</text:span></text:p>
          </table:table-cell>
          <table:table-cell table:style-name="表格8.A3" office:value-type="string">
            <text:p text:style-name="P5" loext:marker-style-name="T146"><text:span text:style-name="T145">找最後執行的運算子</text:span><text:span text:style-name="T146"/></text:p>
          </table:table-cell>
          <table:table-cell table:style-name="表格8.A3" office:value-type="string">
            <text:p text:style-name="P5" loext:marker-style-name="T67"><text:span text:style-name="T67">加減同優先，從左往右：</text:span><text:span text:style-name="T67"/></text:p>
            <text:p text:style-name="P5" loext:marker-style-name="T67"><text:span text:style-name="T67">①(A/B)-C <text:s/>②①+(D×E) <text:s/>③②-(A×C)</text:span><text:span text:style-name="T67"/></text:p>
            <text:p text:style-name="P5" loext:marker-style-name="T88"><text:span text:style-name="T88">最後是 [ - ]，所以樹根 = -</text:span><text:span text:style-name="T88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2">3</text:span></text:p>
          </table:table-cell>
          <table:table-cell table:style-name="表格8.A2" office:value-type="string">
            <text:p text:style-name="P5" loext:marker-style-name="T172"><text:span text:style-name="T171">切左右子樹</text:span><text:span text:style-name="T172"/></text:p>
          </table:table-cell>
          <table:table-cell table:style-name="表格8.A2" office:value-type="string">
            <text:p text:style-name="P5" loext:marker-style-name="T68"><text:span text:style-name="T68">左子樹：((A/B)-C)+(D×E)</text:span><text:span text:style-name="T68"/></text:p>
            <text:p text:style-name="P5" loext:marker-style-name="T68"><text:span text:style-name="T68">右子樹：(A×C)</text:span><text:span text:style-name="T68"/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2">4</text:span></text:p>
          </table:table-cell>
          <table:table-cell table:style-name="表格8.A3" office:value-type="string">
            <text:p text:style-name="P5" loext:marker-style-name="T52"><text:span text:style-name="T51">遞迴處理左子樹</text:span><text:span text:style-name="T52"/></text:p>
          </table:table-cell>
          <table:table-cell table:style-name="表格8.A3" office:value-type="string">
            <text:p text:style-name="P5" loext:marker-style-name="T67"><text:span text:style-name="T173">左子樹最後算 +，再往下拆</text:span><text:span text:style-name="T67">：</text:span></text:p>
            <text:p text:style-name="P5" loext:marker-style-name="T68"><text:span text:style-name="T68">左：(A/B)-C，右：D×E</text:span><text:span text:style-name="T68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2">5</text:span></text:p>
          </table:table-cell>
          <table:table-cell table:style-name="表格8.A2" office:value-type="string">
            <text:p text:style-name="P5" loext:marker-style-name="T52"><text:span text:style-name="T51">遞迴處理 </text:span><text:span text:style-name="T72">(A/B)-C</text:span></text:p>
          </table:table-cell>
          <table:table-cell table:style-name="表格8.A2" office:value-type="string">
            <text:p text:style-name="P5" loext:marker-style-name="T67"><text:span text:style-name="T173">最後算 -</text:span><text:span text:style-name="T67">，</text:span><text:span text:style-name="T68">左：A/B，右：C</text:span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2">6</text:span></text:p>
          </table:table-cell>
          <table:table-cell table:style-name="表格8.A3" office:value-type="string">
            <text:p text:style-name="P5" loext:marker-style-name="T52"><text:span text:style-name="T51">處理 </text:span><text:span text:style-name="T72">A/B</text:span></text:p>
          </table:table-cell>
          <table:table-cell table:style-name="表格8.A3" office:value-type="string">
            <text:p text:style-name="P5" loext:marker-style-name="T67"><text:span text:style-name="T173">最後算 /</text:span><text:span text:style-name="T67">，</text:span><text:span text:style-name="T68">左：A，右：B</text:span></text:p>
          </table:table-cell>
        </table:table-row>
      </table:table>
      <text:p text:style-name="P10"/>
      <text:p text:style-name="P32" loext:marker-style-name="T119"><text:span text:style-name="T122">112</text:span><text:span text:style-name="T118">題完整表達式樹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3" loext:marker-style-name="T26"><text:span text:style-name="T26"><text:s text:c="15"/>- <text:s text:c="9"/>&lt;- 根節點（最後執行）</text:span><text:span text:style-name="T26"/></text:p>
            <text:p text:style-name="P34" loext:marker-style-name="T26"><text:span text:style-name="T26"><text:s text:c="13"/>/ <text:s text:c="2"/>\</text:span><text:span text:style-name="T26"/></text:p>
            <text:p text:style-name="P34" loext:marker-style-name="T26"><text:span text:style-name="T26"><text:s text:c="12"/>+ <text:s text:c="4"/>*</text:span><text:span text:style-name="T26"/></text:p>
            <text:p text:style-name="P34" loext:marker-style-name="T26"><text:span text:style-name="T26"><text:s text:c="11"/>/ \ <text:s text:c="2"/>/ \</text:span><text:span text:style-name="T26"/></text:p>
            <text:p text:style-name="P34" loext:marker-style-name="T26"><text:span text:style-name="T26"><text:s text:c="10"/>- <text:s text:c="2"/>* A <text:s text:c="2"/>C</text:span><text:span text:style-name="T26"/></text:p>
            <text:p text:style-name="P34" loext:marker-style-name="T26"><text:span text:style-name="T26"><text:s text:c="9"/>/ \ / \</text:span><text:span text:style-name="T26"/></text:p>
            <text:p text:style-name="P34" loext:marker-style-name="T26"><text:span text:style-name="T26"><text:s text:c="8"/>/ <text:s/>C D <text:s text:c="2"/>E</text:span><text:span text:style-name="T26"/></text:p>
            <text:p text:style-name="P34" loext:marker-style-name="T26"><text:span text:style-name="T26"><text:s text:c="7"/>/ \</text:span><text:span text:style-name="T26"/></text:p>
            <text:p text:style-name="P35" loext:marker-style-name="T26"><text:span text:style-name="T26"><text:s text:c="6"/>A <text:s text:c="2"/>B</text:span><text:span text:style-name="T26"/></text:p>
          </table:table-cell>
        </table:table-row>
      </table:table>
      <text:p text:style-name="P10"/>
      <text:p text:style-name="P32" loext:marker-style-name="T119"><text:span text:style-name="T122">112</text:span><text:span text:style-name="T118">題答案驗證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132">前序 </text:span><text:span text:style-name="T136">(Preorder)</text:span><text:span text:style-name="T132">：</text:span><text:span text:style-name="T25"> <text:s/>-+-/ABC×DE×AC</text:span></text:p>
            <text:p text:style-name="P5"><text:span text:style-name="T33">後序 </text:span><text:span text:style-name="T43">(Postorder)</text:span><text:span text:style-name="T33">：</text:span><text:span text:style-name="T25"> <text:s/>AB/C-DE×+AC×-</text:span></text:p>
            <text:p text:style-name="P9"><text:span text:style-name="T112">中序 </text:span><text:span text:style-name="T109">(Inorder)</text:span><text:span text:style-name="T112">：</text:span><text:span text:style-name="T25"> <text:s/>A/B-C+D×E-A×C <text:s/>（還原為原始算式）</text:span></text:p>
            <text:p text:style-name="P31" loext:marker-style-name="T54"><text:span text:style-name="T73">★ </text:span><text:span text:style-name="T53">圖片原始標示：前序 </text:span><text:span text:style-name="T73">+-/ABC*DE*AC</text:span><text:span text:style-name="T53">，後序 </text:span><text:span text:style-name="T73">AB/C-DE*+AC*-</text:span><text:span text:style-name="T53">（與上方一致，</text:span><text:span text:style-name="T73">× </text:span><text:span text:style-name="T53">以 </text:span><text:span text:style-name="T73">* </text:span><text:span text:style-name="T53">符號表示）</text:span></text:p>
          </table:table-cell>
        </table:table-row>
      </table:table>
      <text:p text:style-name="Standard"><text:soft-page-break/></text:p>
      <text:h text:style-name="P14" text:outline-level="1" loext:marker-style-name="T13"><text:span text:style-name="T12">第四部分：</text:span><text:span text:style-name="T14">Postfix Stack </text:span><text:span text:style-name="T15">求值</text:span></text:h>
      <text:p text:style-name="P2"/>
      <text:p text:style-name="P25" loext:marker-style-name="T46"><text:span text:style-name="T63">Postfix</text:span><text:span text:style-name="T45">（後置式）最大的優點：</text:span><text:span text:style-name="T47">不需要括號</text:span><text:span text:style-name="T45">，</text:span><text:span text:style-name="T48">不需要考慮優先權</text:span><text:span text:style-name="T45">，</text:span><text:span text:style-name="T100">只要用 </text:span><text:span text:style-name="T92">Stack </text:span><text:span text:style-name="T100">就能計算</text:span><text:span text:style-name="T45">。</text:span>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" loext:marker-style-name="T21"><text:span text:style-name="T28">Postfix Stack </text:span><text:span text:style-name="T20">計算規則</text:span></text:p>
            <text:p text:style-name="P5" loext:marker-style-name="T46"><text:span text:style-name="T63">① </text:span><text:span text:style-name="T47">從左往右讀取每個符號</text:span></text:p>
            <text:p text:style-name="P36" loext:marker-style-name="T46"><text:span text:style-name="T63">② </text:span><text:span text:style-name="T48">看到 運算元（數字</text:span><text:span text:style-name="T64">/</text:span><text:span text:style-name="T48">變數）</text:span><text:span text:style-name="T45">→ </text:span><text:span text:style-name="T101">直接 </text:span><text:span text:style-name="T93">Push </text:span><text:span text:style-name="T101">進 </text:span><text:span text:style-name="T93">Stack</text:span></text:p>
            <text:p text:style-name="P37" loext:marker-style-name="T46"><text:span text:style-name="T63">③ </text:span><text:span text:style-name="T49">看到 運算子（</text:span><text:span text:style-name="T65">+</text:span><text:span text:style-name="T49">、</text:span><text:span text:style-name="T65">-</text:span><text:span text:style-name="T49">、</text:span><text:span text:style-name="T65">×</text:span><text:span text:style-name="T49">、</text:span><text:span text:style-name="T65">÷</text:span><text:span text:style-name="T49">）</text:span><text:span text:style-name="T45">→ </text:span><text:span text:style-name="T85">Pop </text:span><text:span text:style-name="T80">兩個值計算，結果 </text:span><text:span text:style-name="T85">Push </text:span><text:span text:style-name="T80">回 </text:span><text:span text:style-name="T85">Stack</text:span></text:p>
            <text:p text:style-name="P31" loext:marker-style-name="T161"><text:span text:style-name="T163">⚠️ </text:span><text:span text:style-name="T147">重要：</text:span><text:span text:style-name="T149">Pop </text:span><text:span text:style-name="T147">順序是「先 </text:span><text:span text:style-name="T149">Pop </text:span><text:span text:style-name="T147">的是右運算元，後 </text:span><text:span text:style-name="T149">Pop </text:span><text:span text:style-name="T147">的是左運算元」</text:span></text:p>
            <text:p text:style-name="P38" loext:marker-style-name="T54"><text:span text:style-name="T53">例：</text:span><text:span text:style-name="T174">Stack </text:span><text:span text:style-name="T175">由上到下為 </text:span><text:span text:style-name="T174">[5, 2]</text:span><text:span text:style-name="T53">，遇到 </text:span><text:span text:style-name="T73">-</text:span><text:span text:style-name="T53">，計算 </text:span><text:span text:style-name="T73">2 - 5 = -3</text:span><text:span text:style-name="T53">（</text:span><text:span text:style-name="T155">先</text:span><text:span text:style-name="T157">Pop</text:span><text:span text:style-name="T155">的</text:span><text:span text:style-name="T157">5</text:span><text:span text:style-name="T155">是右</text:span><text:span text:style-name="T53">，</text:span><text:span text:style-name="T176">後</text:span><text:span text:style-name="T177">Pop</text:span><text:span text:style-name="T176">的</text:span><text:span text:style-name="T177">2</text:span><text:span text:style-name="T176">是左</text:span><text:span text:style-name="T53">）</text:span></text:p>
          </table:table-cell>
        </table:table-row>
      </table:table>
      <text:p text:style-name="P6"/>
      <text:h text:style-name="P12" text:outline-level="2" loext:marker-style-name="T30"><text:span text:style-name="T30">113</text:span><text:span text:style-name="T29">題實戰：</text:span><text:span text:style-name="T30">36 12 ÷ 10 23 - × 50 40 - +</text:span></text:h>
      <text:p text:style-name="P25" loext:marker-style-name="T34"><text:span text:style-name="T33">答案 </text:span><text:span text:style-name="T43">= -29</text:span>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2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2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59"><text:span text:style-name="T76">①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36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Push 36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[36]</text:span><text:span text:style-name="T59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59"><text:span text:style-name="T76">②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12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Push 12 </text:span><text:span text:style-name="T155">先</text:span><text:span text:style-name="T157">Pop</text:span><text:span text:style-name="T155">的是右</text:span><text:span text:style-name="T60"> </text:span></text:p>
          </table:table-cell>
          <table:table-cell table:style-name="表格12.A3" office:value-type="string">
            <text:p text:style-name="Standard" loext:marker-style-name="T59"><text:span text:style-name="T76">[36, 12]</text:span><text:span text:style-name="T59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59"><text:span text:style-name="T76">③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÷</text:span><text:span text:style-name="T59"/></text:p>
          </table:table-cell>
          <table:table-cell table:style-name="表格12.A2" office:value-type="string">
            <text:p text:style-name="Standard" loext:marker-style-name="T59"><text:span text:style-name="T158">Pop 12</text:span><text:span text:style-name="T76">, Pop 36</text:span><text:span text:style-name="T60">，</text:span><text:span text:style-name="T178">計算 </text:span><text:span text:style-name="T179">36÷</text:span><text:span text:style-name="T158">12</text:span><text:span text:style-name="T179">=3</text:span><text:span text:style-name="T178">，</text:span><text:span text:style-name="T179">Push 3</text:span></text:p>
          </table:table-cell>
          <table:table-cell table:style-name="表格12.A2" office:value-type="string">
            <text:p text:style-name="Standard" loext:marker-style-name="T59"><text:span text:style-name="T76">[3]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36÷12=3</text:span><text:span text:style-name="T59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59"><text:span text:style-name="T76">④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10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Push 10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[3, 10]</text:span><text:span text:style-name="T59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59"><text:span text:style-name="T76">⑤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23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Push 23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[3, 10, 23]</text:span><text:span text:style-name="T59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59"><text:span text:style-name="T76">⑥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-</text:span><text:span text:style-name="T59"/></text:p>
          </table:table-cell>
          <table:table-cell table:style-name="表格12.A3" office:value-type="string">
            <text:p text:style-name="Standard" loext:marker-style-name="T59"><text:span text:style-name="T158">Pop 23</text:span><text:span text:style-name="T76">, Pop 10</text:span><text:span text:style-name="T60">，計算 </text:span><text:span text:style-name="T76">10-</text:span><text:span text:style-name="T158">23</text:span><text:span text:style-name="T76">=-13</text:span><text:span text:style-name="T60">，</text:span><text:span text:style-name="T76">Push -13</text:span></text:p>
          </table:table-cell>
          <table:table-cell table:style-name="表格12.A3" office:value-type="string">
            <text:p text:style-name="Standard" loext:marker-style-name="T59"><text:span text:style-name="T76">[3, -13]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10-23=-13</text:span><text:span text:style-name="T59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59"><text:span text:style-name="T76">⑦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×</text:span><text:span text:style-name="T59"/></text:p>
          </table:table-cell>
          <table:table-cell table:style-name="表格12.A2" office:value-type="string">
            <text:p text:style-name="Standard" loext:marker-style-name="T59"><text:span text:style-name="T158">Pop -13</text:span><text:span text:style-name="T76">, Pop 3</text:span><text:span text:style-name="T60">，計算 </text:span><text:span text:style-name="T76">3×</text:span><text:span text:style-name="T158">(-13)</text:span><text:span text:style-name="T76">=-39</text:span><text:span text:style-name="T60">，</text:span><text:span text:style-name="T76">Push -39</text:span></text:p>
          </table:table-cell>
          <table:table-cell table:style-name="表格12.A2" office:value-type="string">
            <text:p text:style-name="Standard" loext:marker-style-name="T59"><text:span text:style-name="T76">[-39]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3×(-13)=-39</text:span><text:span text:style-name="T59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59"><text:span text:style-name="T76">⑧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50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Push 50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[-39, 50]</text:span><text:span text:style-name="T59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59"><text:span text:style-name="T76">⑨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40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Push 40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[-39, 50, 40]</text:span><text:span text:style-name="T59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59"><text:span text:style-name="T76">⑩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-</text:span><text:span text:style-name="T59"/></text:p>
          </table:table-cell>
          <table:table-cell table:style-name="表格12.A3" office:value-type="string">
            <text:p text:style-name="Standard" loext:marker-style-name="T59"><text:span text:style-name="T158">Pop 40</text:span><text:span text:style-name="T76">, Pop 50</text:span><text:span text:style-name="T60">，計算 </text:span><text:span text:style-name="T76">50-</text:span><text:span text:style-name="T158">40</text:span><text:span text:style-name="T76">=10</text:span><text:span text:style-name="T60">，</text:span><text:span text:style-name="T76">Push 10</text:span></text:p>
          </table:table-cell>
          <table:table-cell table:style-name="表格12.A3" office:value-type="string">
            <text:p text:style-name="Standard" loext:marker-style-name="T59"><text:span text:style-name="T76">[-39, 10]</text:span><text:span text:style-name="T59"/></text:p>
          </table:table-cell>
          <table:table-cell table:style-name="表格12.A3" office:value-type="string">
            <text:p text:style-name="Standard" loext:marker-style-name="T59"><text:span text:style-name="T76">50-40=10</text:span><text:span text:style-name="T59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59"><text:span text:style-name="T76">⑪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+</text:span><text:span text:style-name="T59"/></text:p>
          </table:table-cell>
          <table:table-cell table:style-name="表格12.A2" office:value-type="string">
            <text:p text:style-name="Standard" loext:marker-style-name="T59"><text:span text:style-name="T158">Pop 10</text:span><text:span text:style-name="T76">, Pop -39</text:span><text:span text:style-name="T60">，計算 </text:span><text:span text:style-name="T76">-39+</text:span><text:span text:style-name="T158">10</text:span><text:span text:style-name="T76">=-29</text:span><text:span text:style-name="T60">，</text:span><text:span text:style-name="T76">Push -29</text:span></text:p>
          </table:table-cell>
          <table:table-cell table:style-name="表格12.A2" office:value-type="string">
            <text:p text:style-name="Standard" loext:marker-style-name="T59"><text:span text:style-name="T76">[-29]</text:span><text:span text:style-name="T59"/></text:p>
          </table:table-cell>
          <table:table-cell table:style-name="表格12.A2" office:value-type="string">
            <text:p text:style-name="Standard" loext:marker-style-name="T59"><text:span text:style-name="T76">-39+10=-29</text:span><text:span text:style-name="T59"/></text:p>
          </table:table-cell>
        </table:table-row>
        <table:table-row table:style-name="表格12.1">
          <table:table-cell table:style-name="表格12.A13" office:value-type="string">
            <text:p text:style-name="Standard" loext:marker-style-name="T135"><text:span text:style-name="T134">結果</text:span><text:span text:style-name="T135"/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35"><text:span text:style-name="T140">Stack </text:span><text:span text:style-name="T134">剩下 </text:span><text:span text:style-name="T140">-29</text:span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35"><text:span text:style-name="T140">★ </text:span><text:span text:style-name="T134">答案 </text:span><text:span text:style-name="T140">= -29</text:span></text:p>
          </table:table-cell>
        </table:table-row>
      </table:table>
      <text:p text:style-name="P6"/>
      <text:h text:style-name="P12" text:outline-level="2" loext:marker-style-name="T30"><text:span text:style-name="T30">114</text:span><text:span text:style-name="T29">題實戰：</text:span><text:span text:style-name="T30">2 5 × 4 2 + - 6 +</text:span></text:h>
      <text:p text:style-name="P25" loext:marker-style-name="T34"><text:span text:style-name="T33">答案 </text:span><text:span text:style-name="T43">= 10</text:span>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3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3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59"><text:span text:style-name="T76">①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2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Push 2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[2]</text:span><text:span text:style-name="T59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59"><text:span text:style-name="T76">②</text:span><text:span text:style-name="T59"/></text:p>
          </table:table-cell>
          <table:table-cell table:style-name="表格13.A3" office:value-type="string">
            <text:p text:style-name="Standard" loext:marker-style-name="T59"><text:span text:style-name="T76">5</text:span><text:span text:style-name="T59"/></text:p>
          </table:table-cell>
          <table:table-cell table:style-name="表格13.A3" office:value-type="string">
            <text:p text:style-name="Standard" loext:marker-style-name="T59"><text:span text:style-name="T76">Push 5 <text:s/></text:span><text:span text:style-name="T82">先</text:span><text:span text:style-name="T87">Pop</text:span><text:span text:style-name="T82">的是右</text:span></text:p>
          </table:table-cell>
          <table:table-cell table:style-name="表格13.A3" office:value-type="string">
            <text:p text:style-name="Standard" loext:marker-style-name="T59"><text:span text:style-name="T76">[2, 5]</text:span><text:span text:style-name="T59"/>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Standard" loext:marker-style-name="T59"><text:span text:style-name="T76">③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×</text:span><text:span text:style-name="T59"/></text:p>
          </table:table-cell>
          <table:table-cell table:style-name="表格13.A2" office:value-type="string">
            <text:p text:style-name="Standard" loext:marker-style-name="T59"><text:span text:style-name="T90">Pop 5</text:span><text:span text:style-name="T76">, Pop 2</text:span><text:span text:style-name="T60">，計算 </text:span><text:span text:style-name="T76">2×</text:span><text:span text:style-name="T90">5</text:span><text:span text:style-name="T76">=10</text:span><text:span text:style-name="T60">，</text:span><text:span text:style-name="T76">Push 10</text:span></text:p>
          </table:table-cell>
          <table:table-cell table:style-name="表格13.A2" office:value-type="string">
            <text:p text:style-name="Standard" loext:marker-style-name="T59"><text:span text:style-name="T76">[10]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2×5=10</text:span><text:span text:style-name="T59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59"><text:span text:style-name="T76">④</text:span><text:span text:style-name="T59"/></text:p>
          </table:table-cell>
          <table:table-cell table:style-name="表格13.A3" office:value-type="string">
            <text:p text:style-name="Standard" loext:marker-style-name="T59"><text:span text:style-name="T76">4</text:span><text:span text:style-name="T59"/></text:p>
          </table:table-cell>
          <table:table-cell table:style-name="表格13.A3" office:value-type="string">
            <text:p text:style-name="Standard" loext:marker-style-name="T59"><text:span text:style-name="T76">Push 4</text:span><text:span text:style-name="T59"/></text:p>
          </table:table-cell>
          <table:table-cell table:style-name="表格13.A3" office:value-type="string">
            <text:p text:style-name="Standard" loext:marker-style-name="T59"><text:span text:style-name="T76">[10, 4]</text:span><text:span text:style-name="T59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59"><text:span text:style-name="T76">⑤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2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Push 2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[10, 4, 2]</text:span><text:span text:style-name="T59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59"><text:span text:style-name="T76">⑥</text:span><text:span text:style-name="T59"/></text:p>
          </table:table-cell>
          <table:table-cell table:style-name="表格13.A3" office:value-type="string">
            <text:p text:style-name="Standard" loext:marker-style-name="T59"><text:span text:style-name="T76">+</text:span><text:span text:style-name="T59"/></text:p>
          </table:table-cell>
          <table:table-cell table:style-name="表格13.A3" office:value-type="string">
            <text:p text:style-name="Standard" loext:marker-style-name="T59"><text:span text:style-name="T90">Pop 2</text:span><text:span text:style-name="T76">, Pop 4</text:span><text:span text:style-name="T60">，計算 </text:span><text:span text:style-name="T76">4+</text:span><text:span text:style-name="T90">2</text:span><text:span text:style-name="T76">=6</text:span><text:span text:style-name="T60">，</text:span><text:span text:style-name="T76">Push 6</text:span></text:p>
          </table:table-cell>
          <table:table-cell table:style-name="表格13.A3" office:value-type="string">
            <text:p text:style-name="Standard" loext:marker-style-name="T59"><text:span text:style-name="T76">[10, 6]</text:span><text:span text:style-name="T59"/></text:p>
          </table:table-cell>
          <table:table-cell table:style-name="表格13.A3" office:value-type="string">
            <text:p text:style-name="Standard" loext:marker-style-name="T59"><text:span text:style-name="T76">4+2=6</text:span><text:span text:style-name="T59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59"><text:span text:style-name="T76">⑦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-</text:span><text:span text:style-name="T59"/></text:p>
          </table:table-cell>
          <table:table-cell table:style-name="表格13.A2" office:value-type="string">
            <text:p text:style-name="Standard" loext:marker-style-name="T59"><text:span text:style-name="T90">Pop 6</text:span><text:span text:style-name="T76">, Pop 10</text:span><text:span text:style-name="T60">，計算 </text:span><text:span text:style-name="T76">10-</text:span><text:span text:style-name="T90">6</text:span><text:span text:style-name="T76">=4</text:span><text:span text:style-name="T60">，</text:span><text:span text:style-name="T76">Push 4</text:span></text:p>
          </table:table-cell>
          <table:table-cell table:style-name="表格13.A2" office:value-type="string">
            <text:p text:style-name="Standard" loext:marker-style-name="T59"><text:span text:style-name="T76">[4]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10-6=4</text:span><text:span text:style-name="T59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59"><text:span text:style-name="T76">⑧</text:span><text:span text:style-name="T59"/></text:p>
          </table:table-cell>
          <table:table-cell table:style-name="表格13.A3" office:value-type="string">
            <text:p text:style-name="Standard" loext:marker-style-name="T59"><text:span text:style-name="T76">6</text:span><text:span text:style-name="T59"/></text:p>
          </table:table-cell>
          <table:table-cell table:style-name="表格13.A3" office:value-type="string">
            <text:p text:style-name="Standard" loext:marker-style-name="T59"><text:span text:style-name="T76">Push 6</text:span><text:span text:style-name="T59"/></text:p>
          </table:table-cell>
          <table:table-cell table:style-name="表格13.A3" office:value-type="string">
            <text:p text:style-name="Standard" loext:marker-style-name="T59"><text:span text:style-name="T76">[4, 6]</text:span><text:span text:style-name="T59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59"><text:span text:style-name="T76">⑨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+</text:span><text:span text:style-name="T59"/></text:p>
          </table:table-cell>
          <table:table-cell table:style-name="表格13.A2" office:value-type="string">
            <text:p text:style-name="Standard" loext:marker-style-name="T59"><text:span text:style-name="T90">Pop</text:span><text:span text:style-name="T76"> 6, Pop 4</text:span><text:span text:style-name="T60">，計算 </text:span><text:span text:style-name="T76">4+</text:span><text:span text:style-name="T90">6</text:span><text:span text:style-name="T76">=10</text:span><text:span text:style-name="T60">，</text:span><text:span text:style-name="T76">Push 10</text:span></text:p>
          </table:table-cell>
          <table:table-cell table:style-name="表格13.A2" office:value-type="string">
            <text:p text:style-name="Standard" loext:marker-style-name="T59"><text:span text:style-name="T76">[10]</text:span><text:span text:style-name="T59"/></text:p>
          </table:table-cell>
          <table:table-cell table:style-name="表格13.A2" office:value-type="string">
            <text:p text:style-name="Standard" loext:marker-style-name="T59"><text:span text:style-name="T76">4+6=10</text:span><text:span text:style-name="T59"/></text:p>
          </table:table-cell>
        </table:table-row>
        <table:table-row table:style-name="表格13.1">
          <table:table-cell table:style-name="表格13.A11" office:value-type="string">
            <text:p text:style-name="Standard" loext:marker-style-name="T135"><text:span text:style-name="T134">結果</text:span><text:span text:style-name="T135"/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35"><text:span text:style-name="T140">Stack </text:span><text:span text:style-name="T134">剩下 </text:span><text:span text:style-name="T140">10</text:span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35"><text:span text:style-name="T140">★ </text:span><text:span text:style-name="T134">答案 </text:span><text:span text:style-name="T140">= 10</text:span></text:p>
          </table:table-cell>
        </table:table-row>
      </table:table>
      <text:p text:style-name="Standard"/>
      <text:h text:style-name="P14" text:outline-level="1" loext:marker-style-name="T13"><text:span text:style-name="T12">第五部分：大範例完整解析（答案 </text:span><text:span text:style-name="T13">198</text:span><text:span text:style-name="T12">）</text:span>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24"><text:span text:style-name="T24">算式：((6×(5-3))-(1+2))×(((4+2)÷3)+(5×4))</text:span><text:span text:style-name="T24"/></text:p>
          </table:table-cell>
        </table:table-row>
      </table:table>
      <text:p text:style-name="P8"/>
      <text:h text:style-name="P12" text:outline-level="2" loext:marker-style-name="T30"><text:span text:style-name="T29">建樹（一步一步拆解）</text:span><text:span text:style-name="T30"/></text:h>
      <text:p text:style-name="P4"><text:span text:style-name="T33">步驟 </text:span><text:span text:style-name="T43">1</text:span><text:span text:style-name="T33">：</text:span><text:span text:style-name="T47">最外層最後算</text:span><text:span text:style-name="T45">：</text:span><text:span text:style-name="T64">× <text:s/>→ <text:s/></text:span><text:span text:style-name="T48">根節點 </text:span><text:span text:style-name="T64">= ×</text:span></text:p>
      <text:p text:style-name="P4"><text:span text:style-name="T33">步驟 </text:span><text:span text:style-name="T43">2</text:span><text:span text:style-name="T33">：</text:span><text:span text:style-name="T45">左子樹：</text:span><text:span text:style-name="T63">((6×(5-3))-(1+2))</text:span><text:span text:style-name="T45">，</text:span><text:span text:style-name="T47">最後算 </text:span><text:span text:style-name="T66">-</text:span></text:p>
      <text:p text:style-name="P4"><text:span text:style-name="T33">步驟 </text:span><text:span text:style-name="T43">3</text:span><text:span text:style-name="T33">：</text:span><text:span text:style-name="T45">左子樹左邊：</text:span><text:span text:style-name="T63">6×(5-3)</text:span><text:span text:style-name="T45">，</text:span><text:span text:style-name="T47">最後算 </text:span><text:span text:style-name="T66">×</text:span></text:p>
      <text:p text:style-name="P4"><text:span text:style-name="T33">步驟 </text:span><text:span text:style-name="T43">4</text:span><text:span text:style-name="T33">：</text:span><text:span text:style-name="T45">再拆：</text:span><text:span text:style-name="T63">5-3 </text:span><text:span text:style-name="T47">最後算 </text:span><text:span text:style-name="T66">-</text:span><text:span text:style-name="T45">，葉節點 </text:span><text:span text:style-name="T63">5 </text:span><text:span text:style-name="T45">和 </text:span><text:span text:style-name="T63">3</text:span></text:p>
      <text:p text:style-name="P4"><text:span text:style-name="T33">步驟 </text:span><text:span text:style-name="T43">5</text:span><text:span text:style-name="T33">：</text:span><text:span text:style-name="T45">左子樹右邊：</text:span><text:span text:style-name="T63">1+2</text:span><text:span text:style-name="T45">，葉節點 </text:span><text:span text:style-name="T63">1 </text:span><text:span text:style-name="T45">和 </text:span><text:span text:style-name="T63">2</text:span></text:p>
      <text:p text:style-name="P4"><text:span text:style-name="T33">步驟 </text:span><text:span text:style-name="T43">6</text:span><text:span text:style-name="T33">：</text:span><text:span text:style-name="T45">右子樹：</text:span><text:span text:style-name="T63">((4+2)÷3)+(5×4)</text:span><text:span text:style-name="T45">，</text:span><text:span text:style-name="T47">最後算 </text:span><text:span text:style-name="T66">+</text:span></text:p>
      <text:p text:style-name="P4"><text:span text:style-name="T33">步驟 </text:span><text:span text:style-name="T43">7</text:span><text:span text:style-name="T33">：</text:span><text:span text:style-name="T45">右子樹左邊：</text:span><text:span text:style-name="T63">(4+2)÷3</text:span><text:span text:style-name="T45">，</text:span><text:span text:style-name="T47">最後算 </text:span><text:span text:style-name="T66">÷</text:span></text:p>
      <text:p text:style-name="P4"><text:span text:style-name="T33">步驟 </text:span><text:span text:style-name="T43">8</text:span><text:span text:style-name="T33">：</text:span><text:span text:style-name="T45">再拆：</text:span><text:span text:style-name="T63">4+2</text:span><text:span text:style-name="T45">，葉節點 </text:span><text:span text:style-name="T63">4 </text:span><text:span text:style-name="T45">和 </text:span><text:span text:style-name="T63">2</text:span></text:p>
      <text:p text:style-name="P4"><text:span text:style-name="T33">步驟 </text:span><text:span text:style-name="T43">9</text:span><text:span text:style-name="T33">：</text:span><text:span text:style-name="T45">右子樹右邊：</text:span><text:span text:style-name="T63">5×4</text:span><text:span text:style-name="T45">，葉節點 </text:span><text:span text:style-name="T63">5 </text:span><text:span text:style-name="T45">和 </text:span><text:span text:style-name="T63">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2" loext:marker-style-name="T34"><text:span text:style-name="T33">完整表達式樹</text:span><text:span text:style-name="T34"/></text:p>
            <text:p text:style-name="P39" loext:marker-style-name="T27"><text:span text:style-name="T27"><text:s text:c="19"/>* <text:s text:c="30"/>&lt;- 根節點</text:span><text:span text:style-name="T27"/></text:p>
            <text:p text:style-name="P34" loext:marker-style-name="T27"><text:span text:style-name="T27"><text:s text:c="17"/>/ <text:s text:c="2"/>\</text:span><text:span text:style-name="T27"/></text:p>
            <text:p text:style-name="P34" loext:marker-style-name="T27"><text:span text:style-name="T27"><text:s text:c="10"/>- <text:s text:c="16"/>+</text:span><text:span text:style-name="T27"/></text:p>
            <text:p text:style-name="P34" loext:marker-style-name="T27"><text:span text:style-name="T27"><text:s text:c="8"/>/ <text:s text:c="2"/>\ <text:s text:c="12"/>/ <text:s text:c="2"/>\</text:span><text:span text:style-name="T27"/></text:p>
            <text:p text:style-name="P34" loext:marker-style-name="T27"><text:span text:style-name="T27"><text:s text:c="5"/>* <text:s text:c="8"/>+ <text:s text:c="6"/>/ <text:s text:c="8"/>*</text:span><text:span text:style-name="T27"/></text:p>
            <text:p text:style-name="P34" loext:marker-style-name="T27"><text:span text:style-name="T27"><text:s text:c="3"/>/ <text:s text:c="2"/>\ <text:s text:c="4"/>/ <text:s text:c="2"/>\ <text:s text:c="2"/>/ <text:s text:c="2"/>\ <text:s text:c="4"/>/ <text:s text:c="2"/>\</text:span><text:span text:style-name="T27"/></text:p>
            <text:p text:style-name="P35" loext:marker-style-name="T27"><text:span text:style-name="T27"><text:s text:c="2"/>6 <text:s text:c="4"/>- <text:s text:c="2"/>1 <text:s text:c="4"/>2 + <text:s text:c="4"/>3 <text:s text:c="2"/>5 <text:s text:c="4"/>4</text:span><text:span text:style-name="T27"/></text:p>
            <text:p text:style-name="P35" loext:marker-style-name="T27"><text:span text:style-name="T27"><text:s text:c="6"/>/ <text:s text:c="2"/>\ <text:s text:c="6"/>/ <text:s text:c="2"/>\</text:span><text:span text:style-name="T27"/></text:p>
            <text:p text:style-name="P35" loext:marker-style-name="T27"><text:span text:style-name="T27"><text:s text:c="5"/>5 <text:s text:c="4"/>3 <text:s text:c="4"/>4 <text:s text:c="4"/>2</text:span><text:span text:style-name="T27"/></text:p>
          </table:table-cell>
        </table:table-row>
      </table:table>
      <text:p text:style-name="P10"/>
      <text:h text:style-name="P12" text:outline-level="2" loext:marker-style-name="T30"><text:span text:style-name="T30">Postorder </text:span><text:span text:style-name="T29">求值（</text:span><text:span text:style-name="T30">Bottom-Up</text:span><text:span text:style-name="T29">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 loext:marker-style-name="T4"><text:span text:style-name="T3">步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計算內容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結果</text:span><text:span text:style-name="T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2"><text:span text:style-name="T72">①</text:span><text:span text:style-name="T52"/></text:p>
          </table:table-cell>
          <table:table-cell table:style-name="表格16.A2" office:value-type="string">
            <text:p text:style-name="Standard" loext:marker-style-name="T52"><text:span text:style-name="T72">5-3</text:span><text:span text:style-name="T52"/></text:p>
          </table:table-cell>
          <table:table-cell table:style-name="表格16.A2" office:value-type="string">
            <text:p text:style-name="Standard" loext:marker-style-name="T52"><text:span text:style-name="T72">= 2</text:span><text:span text:style-name="T52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2"><text:span text:style-name="T72">②</text:span><text:span text:style-name="T52"/></text:p>
          </table:table-cell>
          <table:table-cell table:style-name="表格16.A3" office:value-type="string">
            <text:p text:style-name="Standard" loext:marker-style-name="T52"><text:span text:style-name="T72">6×2</text:span><text:span text:style-name="T52"/></text:p>
          </table:table-cell>
          <table:table-cell table:style-name="表格16.A3" office:value-type="string">
            <text:p text:style-name="Standard" loext:marker-style-name="T52"><text:span text:style-name="T72">= 12</text:span><text:span text:style-name="T52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2"><text:span text:style-name="T72">③</text:span><text:span text:style-name="T52"/></text:p>
          </table:table-cell>
          <table:table-cell table:style-name="表格16.A2" office:value-type="string">
            <text:p text:style-name="Standard" loext:marker-style-name="T52"><text:span text:style-name="T72">1+2</text:span><text:span text:style-name="T52"/></text:p>
          </table:table-cell>
          <table:table-cell table:style-name="表格16.A2" office:value-type="string">
            <text:p text:style-name="Standard" loext:marker-style-name="T52"><text:span text:style-name="T72">= 3</text:span><text:span text:style-name="T52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2"><text:span text:style-name="T72">④</text:span><text:span text:style-name="T52"/></text:p>
          </table:table-cell>
          <table:table-cell table:style-name="表格16.A3" office:value-type="string">
            <text:p text:style-name="Standard" loext:marker-style-name="T52"><text:span text:style-name="T72">12-3</text:span><text:span text:style-name="T51">（左子樹完成）</text:span></text:p>
          </table:table-cell>
          <table:table-cell table:style-name="表格16.A3" office:value-type="string">
            <text:p text:style-name="Standard" loext:marker-style-name="T55"><text:span text:style-name="T74">= 9</text:span><text:span text:style-name="T55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2"><text:span text:style-name="T72">⑤</text:span><text:span text:style-name="T52"/></text:p>
          </table:table-cell>
          <table:table-cell table:style-name="表格16.A2" office:value-type="string">
            <text:p text:style-name="Standard" loext:marker-style-name="T52"><text:span text:style-name="T72">4+2</text:span><text:span text:style-name="T52"/></text:p>
          </table:table-cell>
          <table:table-cell table:style-name="表格16.A2" office:value-type="string">
            <text:p text:style-name="Standard" loext:marker-style-name="T52"><text:span text:style-name="T72">= 6</text:span><text:span text:style-name="T52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2"><text:span text:style-name="T72">⑥</text:span><text:span text:style-name="T52"/></text:p>
          </table:table-cell>
          <table:table-cell table:style-name="表格16.A3" office:value-type="string">
            <text:p text:style-name="Standard" loext:marker-style-name="T52"><text:span text:style-name="T72">6÷3</text:span><text:span text:style-name="T52"/></text:p>
          </table:table-cell>
          <table:table-cell table:style-name="表格16.A3" office:value-type="string">
            <text:p text:style-name="Standard" loext:marker-style-name="T52"><text:span text:style-name="T72">= 2</text:span><text:span text:style-name="T52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2"><text:span text:style-name="T72">⑦</text:span><text:span text:style-name="T52"/></text:p>
          </table:table-cell>
          <table:table-cell table:style-name="表格16.A2" office:value-type="string">
            <text:p text:style-name="Standard" loext:marker-style-name="T52"><text:span text:style-name="T72">5×4</text:span><text:span text:style-name="T52"/></text:p>
          </table:table-cell>
          <table:table-cell table:style-name="表格16.A2" office:value-type="string">
            <text:p text:style-name="Standard" loext:marker-style-name="T52"><text:span text:style-name="T72">= 20</text:span><text:span text:style-name="T52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2"><text:span text:style-name="T72">⑧</text:span><text:span text:style-name="T52"/></text:p>
          </table:table-cell>
          <table:table-cell table:style-name="表格16.A3" office:value-type="string">
            <text:p text:style-name="Standard" loext:marker-style-name="T52"><text:span text:style-name="T72">2+20</text:span><text:span text:style-name="T51">（右子樹完成）</text:span></text:p>
          </table:table-cell>
          <table:table-cell table:style-name="表格16.A3" office:value-type="string">
            <text:p text:style-name="Standard" loext:marker-style-name="T55"><text:span text:style-name="T74">= 22</text:span><text:span text:style-name="T55"/></text:p>
          </table:table-cell>
        </table:table-row>
        <table:table-row table:style-name="表格16.1">
          <table:table-cell table:style-name="表格16.A10" office:value-type="string">
            <text:p text:style-name="Standard" loext:marker-style-name="T116"><text:span text:style-name="T121">⑨</text:span><text:span text:style-name="T116"/></text:p>
          </table:table-cell>
          <table:table-cell table:style-name="表格16.A10" office:value-type="string">
            <text:p text:style-name="Standard" loext:marker-style-name="T116"><text:span text:style-name="T121">9×22</text:span><text:span text:style-name="T117">（根節點）</text:span></text:p>
          </table:table-cell>
          <table:table-cell table:style-name="表格16.A10" office:value-type="string">
            <text:p text:style-name="Standard" loext:marker-style-name="T116"><text:span text:style-name="T121">= 198 ★</text:span><text:span text:style-name="T116"/>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" loext:marker-style-name="T21"><text:span text:style-name="T20">為什麼用 </text:span><text:span text:style-name="T28">Postorder</text:span><text:span text:style-name="T20">？這個範例完美說明了一條鏈：</text:span></text:p>
            <text:p text:style-name="P23" loext:marker-style-name="T34"><text:span text:style-name="T43">Expression Tree <text:s/>→ <text:s/>Postorder </text:span><text:span text:style-name="T33">走訪 <text:s/>→ <text:s/></text:span><text:span text:style-name="T43">Postfix </text:span><text:span text:style-name="T33">算式 <text:s/>→ <text:s/></text:span><text:span text:style-name="T43">Stack </text:span><text:span text:style-name="T33">求值 <text:s/>→ <text:s/>答案 </text:span><text:span text:style-name="T43">198</text:span></text:p>
          </table:table-cell>
        </table:table-row>
      </table:table>
      <text:p text:style-name="Standard"/>
      <text:h text:style-name="P14" text:outline-level="1" loext:marker-style-name="T13"><text:span text:style-name="T12">第六部分：</text:span><text:span text:style-name="T14">Infix </text:span><text:span text:style-name="T15">轉 </text:span><text:span text:style-name="T14">Postfix</text:span><text:span text:style-name="T12">（超高頻考題）</text:span></text:h>
      <text:p text:style-name="P2"/>
      <text:p text:style-name="P25" loext:marker-style-name="T46"><text:span text:style-name="T45">這是資訊類考試最常考的題型之一，必須熟練。</text:span><text:span text:style-name="T46"/></text:p>
      <text:p text:style-name="P8"/>
      <text:h text:style-name="P12" text:outline-level="2" loext:marker-style-name="T30"><text:span text:style-name="T29">優先權表（考前必背）</text:span><text:span text:style-name="T30"/>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Standard" loext:marker-style-name="T4"><text:span text:style-name="T3">運算子</text:span><text:span text:style-name="T4"/></text:p>
          </table:table-cell>
          <table:table-cell table:style-name="表格18.A1" office:value-type="string">
            <text:p text:style-name="Standard" loext:marker-style-name="T4"><text:span text:style-name="T3">優先權（數字越大越高）</text:span><text:span text:style-name="T4"/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55"><text:span text:style-name="T74">× <text:s/>÷</text:span><text:span text:style-name="T56">（乘、除）</text:span></text:p>
          </table:table-cell>
          <table:table-cell table:style-name="表格18.A2" office:value-type="string">
            <text:p text:style-name="Standard" loext:marker-style-name="T99"><text:span text:style-name="T98">優先權 </text:span><text:span text:style-name="T95">2</text:span><text:span text:style-name="T98">（高）</text:span></text:p>
          </table:table-cell>
        </table:table-row>
        <table:table-row table:style-name="表格18.1">
          <table:table-cell table:style-name="表格18.A3" office:value-type="string">
            <text:p text:style-name="Standard" loext:marker-style-name="T58"><text:span text:style-name="T75">+ -</text:span><text:span text:style-name="T57">（加、減）</text:span></text:p>
          </table:table-cell>
          <table:table-cell table:style-name="表格18.A3" office:value-type="string">
            <text:p text:style-name="Standard" loext:marker-style-name="T156"><text:span text:style-name="T155">優先權 </text:span><text:span text:style-name="T157">1</text:span><text:span text:style-name="T155">（低）</text:span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83"><text:span text:style-name="T82">（ <text:s/>）（括號）</text:span><text:span text:style-name="T83"/></text:p>
          </table:table-cell>
          <table:table-cell table:style-name="表格18.A2" office:value-type="string">
            <text:p text:style-name="Standard" loext:marker-style-name="T83"><text:span text:style-name="T82">特殊處理（見規則）</text:span><text:span text:style-name="T83"/></text:p>
          </table:table-cell>
        </table:table-row>
      </table:table>
      <text:p text:style-name="P10"/>
      <text:h text:style-name="P12" text:outline-level="2" loext:marker-style-name="T30"><text:span text:style-name="T29">演算法步驟（</text:span><text:span text:style-name="T30">5</text:span><text:span text:style-name="T29">條規則）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" loext:marker-style-name="T46"><text:span text:style-name="T45">規則 </text:span><text:span text:style-name="T63">1</text:span><text:span text:style-name="T45">：</text:span><text:span text:style-name="T47">遇到 運算元（</text:span><text:span text:style-name="T66">A</text:span><text:span text:style-name="T47">、</text:span><text:span text:style-name="T66">B</text:span><text:span text:style-name="T47">、</text:span><text:span text:style-name="T66">1</text:span><text:span text:style-name="T47">、</text:span><text:span text:style-name="T66">2 </text:span><text:span text:style-name="T47">等）</text:span><text:span text:style-name="T45">→ </text:span><text:span text:style-name="T167">直接輸出到結果</text:span></text:p>
            <text:p text:style-name="P38" loext:marker-style-name="T46"><text:span text:style-name="T45">規則 </text:span><text:span text:style-name="T63">2</text:span><text:span text:style-name="T45">：</text:span><text:span text:style-name="T81">遇到 左括號 </text:span><text:span text:style-name="T86">(</text:span><text:span text:style-name="T63"> → </text:span><text:span text:style-name="T45">直接 </text:span><text:span text:style-name="T63">Push </text:span><text:span text:style-name="T45">進 </text:span><text:span text:style-name="T63">Stack</text:span></text:p>
            <text:p text:style-name="P38" loext:marker-style-name="T46"><text:span text:style-name="T45">規則 </text:span><text:span text:style-name="T63">3</text:span><text:span text:style-name="T45">：</text:span><text:span text:style-name="T180">遇到 右括號 </text:span><text:span text:style-name="T182">)</text:span><text:span text:style-name="T63"> → </text:span><text:span text:style-name="T100">持續 </text:span><text:span text:style-name="T92">Pop </text:span><text:span text:style-name="T100">並輸出</text:span><text:span text:style-name="T45">，</text:span><text:span text:style-name="T184">直到遇見左括號 </text:span><text:span text:style-name="T185">( </text:span><text:span text:style-name="T184">為止</text:span><text:span text:style-name="T45">（</text:span><text:span text:style-name="T142">括號本身不輸出</text:span><text:span text:style-name="T45">）</text:span></text:p>
            <text:p text:style-name="P38" loext:marker-style-name="T46"><text:span text:style-name="T45">規則 </text:span><text:span text:style-name="T63">4</text:span><text:span text:style-name="T45">：</text:span><text:span text:style-name="T48">遇到 運算子（</text:span><text:span text:style-name="T64">+</text:span><text:span text:style-name="T48">、</text:span><text:span text:style-name="T64">-</text:span><text:span text:style-name="T48">、</text:span><text:span text:style-name="T64">×</text:span><text:span text:style-name="T48">、</text:span><text:span text:style-name="T64">÷</text:span><text:span text:style-name="T48">）</text:span><text:span text:style-name="T45">→ </text:span><text:span text:style-name="T80">若 </text:span><text:span text:style-name="T85">Stack </text:span><text:span text:style-name="T80">頂端運算子優先權 ≥ 目前運算子</text:span><text:span text:style-name="T45">，</text:span><text:span text:style-name="T100">先 </text:span><text:span text:style-name="T92">Pop </text:span><text:span text:style-name="T100">再 </text:span><text:span text:style-name="T92">Push</text:span><text:span text:style-name="T100">；否則直接 </text:span><text:span text:style-name="T92">Push</text:span><text:span text:style-name="T183">(</text:span><text:span text:style-name="T181">當看到新的運算子時：如果 </text:span><text:span text:style-name="T183">Stack </text:span><text:span text:style-name="T181">裡面的運算子比它更早算就：先拿</text:span><text:span text:style-name="T183">Stack </text:span><text:span text:style-name="T181">裡面的運算子來輸出</text:span><text:span text:style-name="T183">)</text:span></text:p>
            <text:p text:style-name="P37" loext:marker-style-name="T46"><text:span text:style-name="T45">規則 </text:span><text:span text:style-name="T63">5</text:span><text:span text:style-name="T45">：</text:span><text:span text:style-name="T47">讀取結束 </text:span><text:span text:style-name="T45">→ </text:span><text:span text:style-name="T167">把 </text:span><text:span text:style-name="T168">Stack </text:span><text:span text:style-name="T167">剩餘的所有運算子全部 </text:span><text:span text:style-name="T168">Pop </text:span><text:span text:style-name="T167">並輸出</text:span></text:p>
          </table:table-cell>
        </table:table-row>
      </table:table>
      <text:p text:style-name="P10"/>
      <text:h text:style-name="P12" text:outline-level="2" loext:marker-style-name="T30"><text:span text:style-name="T30">5 </text:span><text:span text:style-name="T29">道練習題完整解析</text:span></text:h>
      <text:p text:style-name="P32" loext:marker-style-name="T119"><text:span text:style-name="T118">題目 </text:span><text:span text:style-name="T122">1</text:span><text:span text:style-name="T118">：</text:span><text:span text:style-name="T123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0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0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0.A2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0.A2" office:value-type="string">
            <text:p text:style-name="Standard" loext:marker-style-name="T69"><text:span text:style-name="T69">（空）</text:span><text:span text:style-name="T69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69"><text:span text:style-name="T69">+</text:span><text:span text:style-name="T69"/></text:p>
          </table:table-cell>
          <table:table-cell table:style-name="表格20.A3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0.A3" office:value-type="string">
            <text:p text:style-name="Standard" loext:marker-style-name="T69"><text:span text:style-name="T69">+</text:span><text:span text:style-name="T69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69"><text:span text:style-name="T69">B</text:span><text:span text:style-name="T69"/></text:p>
          </table:table-cell>
          <table:table-cell table:style-name="表格20.A2" office:value-type="string">
            <text:p text:style-name="Standard" loext:marker-style-name="T69"><text:span text:style-name="T69">AB</text:span><text:span text:style-name="T69"/></text:p>
          </table:table-cell>
          <table:table-cell table:style-name="表格20.A2" office:value-type="string">
            <text:p text:style-name="Standard" loext:marker-style-name="T69"><text:span text:style-name="T69">+</text:span><text:span text:style-name="T69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69"><text:span text:style-name="T69">*</text:span><text:span text:style-name="T69"/></text:p>
          </table:table-cell>
          <table:table-cell table:style-name="表格20.A3" office:value-type="string">
            <text:p text:style-name="Standard" loext:marker-style-name="T69"><text:span text:style-name="T69">AB</text:span><text:span text:style-name="T69"/></text:p>
          </table:table-cell>
          <table:table-cell table:style-name="表格20.A3" office:value-type="string">
            <text:p text:style-name="Standard" loext:marker-style-name="T69"><text:span text:style-name="T70">+ *</text:span><text:span text:style-name="T69"> <text:s text:c="4"/>(</text:span><text:span text:style-name="T89">* &gt; +，直接放入</text:span><text:span text:style-name="T69">)</text:span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69"><text:span text:style-name="T69">C</text:span><text:span text:style-name="T69"/></text:p>
          </table:table-cell>
          <table:table-cell table:style-name="表格20.A2" office:value-type="string">
            <text:p text:style-name="Standard" loext:marker-style-name="T69"><text:span text:style-name="T69">ABC</text:span><text:span text:style-name="T69"/></text:p>
          </table:table-cell>
          <table:table-cell table:style-name="表格20.A2" office:value-type="string">
            <text:p text:style-name="Standard" loext:marker-style-name="T69"><text:span text:style-name="T69">+ *</text:span><text:span text:style-name="T69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69"><text:span text:style-name="T69">結束</text:span><text:span text:style-name="T69"/></text:p>
          </table:table-cell>
          <table:table-cell table:style-name="表格20.A3" office:value-type="string">
            <text:p text:style-name="Standard" loext:marker-style-name="T69"><text:span text:style-name="T69">ABC</text:span><text:span text:style-name="T102">*+</text:span></text:p>
          </table:table-cell>
          <table:table-cell table:style-name="表格20.A3" office:value-type="string">
            <text:p text:style-name="Standard" loext:marker-style-name="T69"><text:span text:style-name="T69">（全部 </text:span><text:span text:style-name="T186">Pop：先 *，再 +</text:span><text:span text:style-name="T69">）</text:span>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5" loext:marker-style-name="T138"><text:span text:style-name="T138">★ 答案：</text:span><text:span text:style-name="T151">ABC*+</text:span></text:p>
          </table:table-cell>
          <table:covered-table-cell/>
          <table:covered-table-cell/>
        </table:table-row>
      </table:table>
      <text:p text:style-name="P8"/>
      <text:p text:style-name="P32" loext:marker-style-name="T119"><text:span text:style-name="T118">題目 </text:span><text:span text:style-name="T122">2</text:span><text:span text:style-name="T118">：</text:span><text:span text:style-name="T123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1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1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69"><text:span text:style-name="T69">(</text:span><text:span text:style-name="T69"/></text:p>
          </table:table-cell>
          <table:table-cell table:style-name="表格21.A2" office:value-type="string">
            <text:p text:style-name="Standard" loext:marker-style-name="T69"><text:span text:style-name="T69">（空）</text:span><text:span text:style-name="T69"/></text:p>
          </table:table-cell>
          <table:table-cell table:style-name="表格21.A2" office:value-type="string">
            <text:p text:style-name="Standard" loext:marker-style-name="T69"><text:span text:style-name="T69">(</text:span><text:span text:style-name="T69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1.A3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1.A3" office:value-type="string">
            <text:p text:style-name="Standard" loext:marker-style-name="T69"><text:span text:style-name="T69">(</text:span><text:span text:style-name="T69"/></text:p>
          </table:table-cell>
        </table:table-row>
        <text:soft-page-break/>
        <table:table-row table:style-name="表格21.1">
          <table:table-cell table:style-name="表格21.A2" office:value-type="string">
            <text:p text:style-name="Standard" loext:marker-style-name="T69"><text:span text:style-name="T69">+</text:span><text:span text:style-name="T69"/></text:p>
          </table:table-cell>
          <table:table-cell table:style-name="表格21.A2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1.A2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69"><text:span text:style-name="T69">B</text:span><text:span text:style-name="T69"/></text:p>
          </table:table-cell>
          <table:table-cell table:style-name="表格21.A3" office:value-type="string">
            <text:p text:style-name="Standard" loext:marker-style-name="T69"><text:span text:style-name="T69">AB</text:span><text:span text:style-name="T69"/></text:p>
          </table:table-cell>
          <table:table-cell table:style-name="表格21.A3" office:value-type="string">
            <text:p text:style-name="Standard" loext:marker-style-name="T69"><text:span text:style-name="T69">( +</text:span><text:span text:style-name="T69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69"><text:span text:style-name="T69">)</text:span><text:span text:style-name="T69"/></text:p>
          </table:table-cell>
          <table:table-cell table:style-name="表格21.A2" office:value-type="string">
            <text:p text:style-name="Standard" loext:marker-style-name="T69"><text:span text:style-name="T69">AB</text:span><text:span text:style-name="T71">+</text:span></text:p>
          </table:table-cell>
          <table:table-cell table:style-name="表格21.A2" office:value-type="string">
            <text:p text:style-name="Standard" loext:marker-style-name="T89"><text:span text:style-name="T89">（空） <text:s/>← Pop 到 ( 為止</text:span><text:span text:style-name="T89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69"><text:span text:style-name="T69">*</text:span><text:span text:style-name="T69"/></text:p>
          </table:table-cell>
          <table:table-cell table:style-name="表格21.A3" office:value-type="string">
            <text:p text:style-name="Standard" loext:marker-style-name="T69"><text:span text:style-name="T69">AB</text:span><text:span text:style-name="T71">+</text:span></text:p>
          </table:table-cell>
          <table:table-cell table:style-name="表格21.A3" office:value-type="string">
            <text:p text:style-name="Standard" loext:marker-style-name="T69"><text:span text:style-name="T69">*</text:span><text:span text:style-name="T69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69"><text:span text:style-name="T69">C</text:span><text:span text:style-name="T69"/></text:p>
          </table:table-cell>
          <table:table-cell table:style-name="表格21.A2" office:value-type="string">
            <text:p text:style-name="Standard" loext:marker-style-name="T69"><text:span text:style-name="T69">AB+C</text:span><text:span text:style-name="T69"/></text:p>
          </table:table-cell>
          <table:table-cell table:style-name="表格21.A2" office:value-type="string">
            <text:p text:style-name="Standard" loext:marker-style-name="T69"><text:span text:style-name="T69">*</text:span><text:span text:style-name="T69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69"><text:span text:style-name="T69">結束</text:span><text:span text:style-name="T69"/></text:p>
          </table:table-cell>
          <table:table-cell table:style-name="表格21.A3" office:value-type="string">
            <text:p text:style-name="Standard" loext:marker-style-name="T69"><text:span text:style-name="T69">AB+C*</text:span><text:span text:style-name="T69"/></text:p>
          </table:table-cell>
          <table:table-cell table:style-name="表格21.A3" office:value-type="string">
            <text:p text:style-name="Standard" loext:marker-style-name="T69"><text:span text:style-name="T69">（Pop *）</text:span><text:span text:style-name="T69"/>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5" loext:marker-style-name="T138"><text:span text:style-name="T138">★ 答案：AB+C*</text:span><text:span text:style-name="T138"/></text:p>
          </table:table-cell>
          <table:covered-table-cell/>
          <table:covered-table-cell/>
        </table:table-row>
      </table:table>
      <text:p text:style-name="P8"/>
      <text:p text:style-name="P32" loext:marker-style-name="T119"><text:span text:style-name="T118">題目 </text:span><text:span text:style-name="T122">3</text:span><text:span text:style-name="T118">：</text:span><text:span text:style-name="T123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2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2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2.A2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2.A2" office:value-type="string">
            <text:p text:style-name="Standard" loext:marker-style-name="T69"><text:span text:style-name="T69">（空）</text:span><text:span text:style-name="T69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69"><text:span text:style-name="T69">+</text:span><text:span text:style-name="T69"/></text:p>
          </table:table-cell>
          <table:table-cell table:style-name="表格22.A3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2.A3" office:value-type="string">
            <text:p text:style-name="Standard" loext:marker-style-name="T69"><text:span text:style-name="T69">+</text:span><text:span text:style-name="T69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69"><text:span text:style-name="T69">B</text:span><text:span text:style-name="T69"/></text:p>
          </table:table-cell>
          <table:table-cell table:style-name="表格22.A2" office:value-type="string">
            <text:p text:style-name="Standard" loext:marker-style-name="T69"><text:span text:style-name="T69">AB</text:span><text:span text:style-name="T69"/></text:p>
          </table:table-cell>
          <table:table-cell table:style-name="表格22.A2" office:value-type="string">
            <text:p text:style-name="Standard" loext:marker-style-name="T69"><text:span text:style-name="T69">+</text:span><text:span text:style-name="T69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69"><text:span text:style-name="T69">*</text:span><text:span text:style-name="T69"/></text:p>
          </table:table-cell>
          <table:table-cell table:style-name="表格22.A3" office:value-type="string">
            <text:p text:style-name="Standard" loext:marker-style-name="T69"><text:span text:style-name="T69">AB</text:span><text:span text:style-name="T69"/></text:p>
          </table:table-cell>
          <table:table-cell table:style-name="表格22.A3" office:value-type="string">
            <text:p text:style-name="Standard" loext:marker-style-name="T69"><text:span text:style-name="T70">+ * </text:span><text:span text:style-name="T69"><text:s/>（</text:span><text:span text:style-name="T89">* &gt; +，直接放</text:span><text:span text:style-name="T69">）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69"><text:span text:style-name="T69">C</text:span><text:span text:style-name="T69"/></text:p>
          </table:table-cell>
          <table:table-cell table:style-name="表格22.A2" office:value-type="string">
            <text:p text:style-name="Standard" loext:marker-style-name="T69"><text:span text:style-name="T69">ABC</text:span><text:span text:style-name="T69"/></text:p>
          </table:table-cell>
          <table:table-cell table:style-name="表格22.A2" office:value-type="string">
            <text:p text:style-name="Standard" loext:marker-style-name="T70"><text:span text:style-name="T70">+ *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69"><text:span text:style-name="T69">-</text:span><text:span text:style-name="T69"/></text:p>
          </table:table-cell>
          <table:table-cell table:style-name="表格22.A3" office:value-type="string">
            <text:p text:style-name="Standard" loext:marker-style-name="T69"><text:span text:style-name="T69">ABC*+</text:span><text:span text:style-name="T69"/></text:p>
          </table:table-cell>
          <table:table-cell table:style-name="表格22.A3" office:value-type="string">
            <text:p text:style-name="Standard" loext:marker-style-name="T69"><text:span text:style-name="T69">- <text:s/>（</text:span><text:span text:style-name="T170">- ≤ *，先 Pop *</text:span><text:span text:style-name="T69">；</text:span><text:span text:style-name="T103">- ≤ +，再 Pop +</text:span><text:span text:style-name="T69">；</text:span><text:span text:style-name="T187">最後 Push -</text:span><text:span text:style-name="T69">）(</text:span><text:span text:style-name="T102">當看到新的運算子時：如果 Stack 裡面的運算子比它更早算就：先拿出來輸出</text:span><text:span text:style-name="T69">)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69"><text:span text:style-name="T69">D</text:span><text:span text:style-name="T69"/></text:p>
          </table:table-cell>
          <table:table-cell table:style-name="表格22.A2" office:value-type="string">
            <text:p text:style-name="Standard" loext:marker-style-name="T69"><text:span text:style-name="T69">ABC*+D</text:span><text:span text:style-name="T69"/></text:p>
          </table:table-cell>
          <table:table-cell table:style-name="表格22.A2" office:value-type="string">
            <text:p text:style-name="Standard" loext:marker-style-name="T69"><text:span text:style-name="T69">-</text:span><text:span text:style-name="T69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69"><text:span text:style-name="T69">結束</text:span><text:span text:style-name="T69"/></text:p>
          </table:table-cell>
          <table:table-cell table:style-name="表格22.A3" office:value-type="string">
            <text:p text:style-name="Standard" loext:marker-style-name="T69"><text:span text:style-name="T69">ABC*+D-</text:span><text:span text:style-name="T69"/></text:p>
          </table:table-cell>
          <table:table-cell table:style-name="表格22.A3" office:value-type="string">
            <text:p text:style-name="Standard" loext:marker-style-name="T69"><text:span text:style-name="T69">（Pop -）</text:span><text:span text:style-name="T69"/>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5" loext:marker-style-name="T138"><text:span text:style-name="T138">★ 答案：ABC*+D-</text:span><text:span text:style-name="T138"/></text:p>
          </table:table-cell>
          <table:covered-table-cell/>
          <table:covered-table-cell/>
        </table:table-row>
      </table:table>
      <text:p text:style-name="P8"/>
      <text:p text:style-name="P32" loext:marker-style-name="T119"><text:span text:style-name="T118">題目 </text:span><text:span text:style-name="T122">4</text:span><text:span text:style-name="T118">：</text:span><text:span text:style-name="T123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3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3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69"><text:span text:style-name="T69">(</text:span><text:span text:style-name="T69"/></text:p>
          </table:table-cell>
          <table:table-cell table:style-name="表格23.A2" office:value-type="string">
            <text:p text:style-name="Standard" loext:marker-style-name="T69"><text:span text:style-name="T69">（空）</text:span><text:span text:style-name="T69"/></text:p>
          </table:table-cell>
          <table:table-cell table:style-name="表格23.A2" office:value-type="string">
            <text:p text:style-name="Standard" loext:marker-style-name="T69"><text:span text:style-name="T69">(</text:span><text:span text:style-name="T69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(</text:span><text:span text:style-name="T69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69"><text:span text:style-name="T69">+</text:span><text:span text:style-name="T69"/></text:p>
          </table:table-cell>
          <table:table-cell table:style-name="表格23.A2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3.A2" office:value-type="string">
            <text:p text:style-name="Standard" loext:marker-style-name="T69"><text:span text:style-name="T69">( +</text:span><text:span text:style-name="T69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69"><text:span text:style-name="T69">B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AB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( +</text:span><text:span text:style-name="T69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69"><text:span text:style-name="T69">)</text:span><text:span text:style-name="T69"/></text:p>
          </table:table-cell>
          <table:table-cell table:style-name="表格23.A2" office:value-type="string">
            <text:p text:style-name="Standard" loext:marker-style-name="T69"><text:span text:style-name="T69">AB+</text:span><text:span text:style-name="T69"/></text:p>
          </table:table-cell>
          <table:table-cell table:style-name="表格23.A2" office:value-type="string">
            <text:p text:style-name="Standard" loext:marker-style-name="T69"><text:span text:style-name="T69">（空）</text:span><text:span text:style-name="T69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69"><text:span text:style-name="T69">*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AB+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*</text:span><text:span text:style-name="T69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69"><text:span text:style-name="T69">(</text:span><text:span text:style-name="T69"/></text:p>
          </table:table-cell>
          <table:table-cell table:style-name="表格23.A2" office:value-type="string">
            <text:p text:style-name="Standard" loext:marker-style-name="T69"><text:span text:style-name="T69">AB+</text:span><text:span text:style-name="T69"/></text:p>
          </table:table-cell>
          <table:table-cell table:style-name="表格23.A2" office:value-type="string">
            <text:p text:style-name="Standard" loext:marker-style-name="T69"><text:span text:style-name="T69">* (</text:span><text:span text:style-name="T69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69"><text:span text:style-name="T69">C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AB+C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* (</text:span><text:span text:style-name="T69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69"><text:span text:style-name="T69">-</text:span><text:span text:style-name="T69"/></text:p>
          </table:table-cell>
          <table:table-cell table:style-name="表格23.A2" office:value-type="string">
            <text:p text:style-name="Standard" loext:marker-style-name="T69"><text:span text:style-name="T69">AB+C</text:span><text:span text:style-name="T69"/></text:p>
          </table:table-cell>
          <table:table-cell table:style-name="表格23.A2" office:value-type="string">
            <text:p text:style-name="Standard" loext:marker-style-name="T69"><text:span text:style-name="T69">* ( - <text:s/></text:span><text:span text:style-name="T127">注意此處：Stack 頂端根本不是 *</text:span><text:span text:style-name="T188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69"><text:span text:style-name="T69">D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AB+CD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* ( -</text:span><text:span text:style-name="T69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69"><text:span text:style-name="T69">)</text:span><text:span text:style-name="T69"/></text:p>
          </table:table-cell>
          <table:table-cell table:style-name="表格23.A2" office:value-type="string">
            <text:p text:style-name="Standard" loext:marker-style-name="T69"><text:span text:style-name="T69">AB+CD-</text:span><text:span text:style-name="T69"/></text:p>
          </table:table-cell>
          <table:table-cell table:style-name="表格23.A2" office:value-type="string">
            <text:p text:style-name="Standard" loext:marker-style-name="T69"><text:span text:style-name="T71">* </text:span><text:span text:style-name="T69"><text:s text:c="2"/>← </text:span><text:span text:style-name="T189">Pop 到 (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69"><text:span text:style-name="T69">結束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AB+CD-*</text:span><text:span text:style-name="T69"/></text:p>
          </table:table-cell>
          <table:table-cell table:style-name="表格23.A3" office:value-type="string">
            <text:p text:style-name="Standard" loext:marker-style-name="T69"><text:span text:style-name="T69">（Pop *）</text:span><text:span text:style-name="T69"/>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5" loext:marker-style-name="T138"><text:span text:style-name="T138">★ 答案：AB+CD-*</text:span><text:span text:style-name="T138"/></text:p>
          </table:table-cell>
          <table:covered-table-cell/>
          <table:covered-table-cell/>
        </table:table-row>
      </table:table>
      <text:p text:style-name="P8"/>
      <text:p text:style-name="P32" loext:marker-style-name="T119"><text:span text:style-name="T118">題目 </text:span><text:span text:style-name="T122">5</text:span><text:span text:style-name="T118">：</text:span><text:span text:style-name="T123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4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4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（空）</text:span><text:span text:style-name="T69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69"><text:span text:style-name="T69">+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A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+</text:span><text:span text:style-name="T69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69"><text:span text:style-name="T69">B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AB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+</text:span><text:span text:style-name="T69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69"><text:span text:style-name="T69">*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AB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+ * <text:s/>（</text:span><text:span text:style-name="T89">* &gt; +，直接放</text:span><text:span text:style-name="T69">）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69"><text:span text:style-name="T69">(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AB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+ * (</text:span><text:span text:style-name="T69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69"><text:span text:style-name="T69">C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ABC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+ * (</text:span><text:span text:style-name="T69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69"><text:span text:style-name="T69">-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ABC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+ * ( -</text:span><text:span text:style-name="T69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69"><text:span text:style-name="T69">D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ABCD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+ * ( -</text:span><text:span text:style-name="T69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69"><text:span text:style-name="T69">)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ABCD-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+ * <text:s text:c="2"/>←</text:span><text:span text:style-name="T189"> Pop 到 (</text:span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69"><text:span text:style-name="T69">/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ABCD-*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讀到 / </text:span><text:span text:style-name="T70">此時 Stack頂端是 *</text:span><text:span text:style-name="T69"><text:line-break/><text:line-break/></text:span><text:span text:style-name="T152">/ 與 * 同優先權 → 先 Pop *</text:span><text:span text:style-name="T69"><text:line-break/><text:line-break/></text:span><text:span text:style-name="T104">此時新的 Stack頂端變成 +</text:span><text:span text:style-name="T69"><text:line-break/><text:line-break/></text:span><text:span text:style-name="T102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69"><text:span text:style-name="T69">E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ABCD-*E</text:span><text:span text:style-name="T69"/></text:p>
          </table:table-cell>
          <table:table-cell table:style-name="表格24.A2" office:value-type="string">
            <text:p text:style-name="Standard" loext:marker-style-name="T69"><text:span text:style-name="T69">+ /</text:span><text:span text:style-name="T69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69"><text:span text:style-name="T69">結束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ABCD-*E/+</text:span><text:span text:style-name="T69"/></text:p>
          </table:table-cell>
          <table:table-cell table:style-name="表格24.A3" office:value-type="string">
            <text:p text:style-name="Standard" loext:marker-style-name="T69"><text:span text:style-name="T69">（Pop /，再 Pop +）</text:span><text:span text:style-name="T69"/>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5" loext:marker-style-name="T138"><text:span text:style-name="T138">★ 答案：ABCD-*E/+</text:span><text:span text:style-name="T138"/></text:p>
          </table:table-cell>
          <table:covered-table-cell/>
          <table:covered-table-cell/>
        </table:table-row>
      </table:table>
      <text:p text:style-name="P10"/>
      <text:h text:style-name="P12" text:outline-level="2" loext:marker-style-name="T30"><text:span text:style-name="T29">常見陷阱：</text:span><text:span text:style-name="T32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" loext:marker-style-name="T24"><text:span text:style-name="T24">題目：A-B+C</text:span><text:span text:style-name="T24"/></text:p>
            <text:p text:style-name="P39" loext:marker-style-name="T164"><text:span text:style-name="T164">❌ 錯誤答案：ABC+-</text:span><text:span text:style-name="T164"/></text:p>
            <text:p text:style-name="P38" loext:marker-style-name="T137"><text:span text:style-name="T137">✅ </text:span><text:span text:style-name="T139">正確答案：AB-C+</text:span></text:p>
            <text:p text:style-name="P9" loext:marker-style-name="T46"><text:span text:style-name="T45">原因：</text:span><text:span text:style-name="T63">+ </text:span><text:span text:style-name="T45">和 </text:span><text:span text:style-name="T63">- </text:span><text:span text:style-name="T45">優先權相同，採左結合，計算順序為 </text:span><text:span text:style-name="T63">(A-B)+C</text:span><text:span text:style-name="T45">。 </text:span><text:span text:style-name="T80">遇到 </text:span><text:span text:style-name="T85">+ </text:span><text:span text:style-name="T80">時，</text:span><text:span text:style-name="T85">Stack </text:span><text:span text:style-name="T80">頂端是 </text:span><text:span text:style-name="T85">-</text:span><text:span text:style-name="T80">，兩者優先權相同</text:span><text:span text:style-name="T45">，</text:span><text:span text:style-name="T184">必須先 </text:span><text:span text:style-name="T185">Pop -</text:span><text:span text:style-name="T184">，再 </text:span><text:span text:style-name="T185">Push +</text:span><text:span text:style-name="T45">。</text:span></text:p>
          </table:table-cell>
        </table:table-row>
      </table:table>
      <text:p text:style-name="Standard"/>
      <text:h text:style-name="P14" text:outline-level="1" loext:marker-style-name="T13"><text:span text:style-name="T12">第七部分：</text:span><text:span text:style-name="T14">Prefix </text:span><text:span text:style-name="T15">求值</text:span><text:span text:style-name="T12"> 與</text:span><text:span text:style-name="T16"> </text:span><text:span text:style-name="T17">Postfix ↔ Tree </text:span><text:span text:style-name="T16">互轉</text:span></text:h>
      <text:p text:style-name="P2"/>
      <text:h text:style-name="P12" text:outline-level="2" loext:marker-style-name="T30"><text:span text:style-name="T30">Prefix Stack </text:span><text:span text:style-name="T29">求值</text:span></text:h>
      <text:p text:style-name="P25" loext:marker-style-name="T46"><text:span text:style-name="T150">Prefix</text:span><text:span text:style-name="T148">（前置式）與 </text:span><text:span text:style-name="T150">Postfix </text:span><text:span text:style-name="T148">的差別在於讀取方向</text:span><text:span text:style-name="T45">：</text:span><text:span text:style-name="T128">Postfix </text:span><text:span text:style-name="T126">從左往右，</text:span><text:span text:style-name="T128">Prefix </text:span><text:span text:style-name="T126">從右往左</text:span><text:span text:style-name="T45">。</text:span>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21"><text:span text:style-name="T28">Prefix Stack </text:span><text:span text:style-name="T20">計算規則</text:span></text:p>
            <text:p text:style-name="P39" loext:marker-style-name="T46"><text:span text:style-name="T63">① </text:span><text:span text:style-name="T100">從右往左讀取每個符號</text:span></text:p>
            <text:p text:style-name="P36" loext:marker-style-name="T46"><text:span text:style-name="T63">② </text:span><text:span text:style-name="T47">看到 運算元 </text:span><text:span text:style-name="T45">→ </text:span><text:span text:style-name="T93">Push </text:span><text:span text:style-name="T101">進 </text:span><text:span text:style-name="T93">Stack</text:span></text:p>
            <text:p text:style-name="P37" loext:marker-style-name="T46"><text:span text:style-name="T63">③ </text:span><text:span text:style-name="T50">看到 運算子</text:span><text:span text:style-name="T45"> → </text:span><text:span text:style-name="T85">Pop </text:span><text:span text:style-name="T80">兩個值，計算（先 </text:span><text:span text:style-name="T85">Pop </text:span><text:span text:style-name="T80">的是左邊，後 </text:span><text:span text:style-name="T85">Pop </text:span><text:span text:style-name="T80">的是右邊）</text:span><text:span text:style-name="T45">，</text:span><text:span text:style-name="T63">Push </text:span><text:span text:style-name="T45">結果</text:span></text:p>
            <text:p text:style-name="P31" loext:marker-style-name="T192"><text:span text:style-name="T190">⚠️ </text:span><text:span text:style-name="T191">注意：</text:span><text:span text:style-name="T190">Prefix </text:span><text:span text:style-name="T191">的 </text:span><text:span text:style-name="T190">Pop </text:span><text:span text:style-name="T191">順序與 </text:span><text:span text:style-name="T190">Postfix </text:span><text:span text:style-name="T191">相反！</text:span></text:p>
          </table:table-cell>
        </table:table-row>
      </table:table>
      <text:p text:style-name="P8"/>
      <text:p text:style-name="P25" loext:marker-style-name="T24"><text:span text:style-name="T24">範例：+*23 4（代表 (2×3)+4 = 10）</text:span><text:span text:style-name="T24"/>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Standard" loext:marker-style-name="T6"><text:span text:style-name="T5">符號（從右到左）</text:span><text:span text:style-name="T6"/></text:p>
          </table:table-cell>
          <table:table-cell table:style-name="表格27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27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59"><text:span text:style-name="T76">4</text:span><text:span text:style-name="T60">（最右）</text:span></text:p>
          </table:table-cell>
          <table:table-cell table:style-name="表格27.A2" office:value-type="string">
            <text:p text:style-name="Standard" loext:marker-style-name="T59"><text:span text:style-name="T76">Push 4</text:span><text:span text:style-name="T59"/></text:p>
          </table:table-cell>
          <table:table-cell table:style-name="表格27.A2" office:value-type="string">
            <text:p text:style-name="Standard" loext:marker-style-name="T59"><text:span text:style-name="T76">[4]</text:span><text:span text:style-name="T59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59"><text:span text:style-name="T76">3</text:span><text:span text:style-name="T59"/></text:p>
          </table:table-cell>
          <table:table-cell table:style-name="表格27.A3" office:value-type="string">
            <text:p text:style-name="Standard" loext:marker-style-name="T59"><text:span text:style-name="T76">Push 3</text:span><text:span text:style-name="T59"/></text:p>
          </table:table-cell>
          <table:table-cell table:style-name="表格27.A3" office:value-type="string">
            <text:p text:style-name="Standard" loext:marker-style-name="T59"><text:span text:style-name="T76">[4, 3]</text:span><text:span text:style-name="T59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59"><text:span text:style-name="T76">2</text:span><text:span text:style-name="T59"/></text:p>
          </table:table-cell>
          <table:table-cell table:style-name="表格27.A2" office:value-type="string">
            <text:p text:style-name="Standard" loext:marker-style-name="T59"><text:span text:style-name="T76">Push 2</text:span><text:span text:style-name="T59"/></text:p>
          </table:table-cell>
          <table:table-cell table:style-name="表格27.A2" office:value-type="string">
            <text:p text:style-name="Standard" loext:marker-style-name="T59"><text:span text:style-name="T76">[4, 3, 2]</text:span><text:span text:style-name="T59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59"><text:span text:style-name="T76">*</text:span><text:span text:style-name="T59"/></text:p>
          </table:table-cell>
          <table:table-cell table:style-name="表格27.A3" office:value-type="string">
            <text:p text:style-name="Standard" loext:marker-style-name="T59"><text:span text:style-name="T105">Pop 2</text:span><text:span text:style-name="T76">, Pop 3</text:span><text:span text:style-name="T60">，計算 </text:span><text:span text:style-name="T105">2</text:span><text:span text:style-name="T76">×3=6</text:span><text:span text:style-name="T60">，</text:span><text:span text:style-name="T76">Push 6</text:span></text:p>
          </table:table-cell>
          <table:table-cell table:style-name="表格27.A3" office:value-type="string">
            <text:p text:style-name="Standard" loext:marker-style-name="T59"><text:span text:style-name="T76">[4, 6]</text:span><text:span text:style-name="T59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59"><text:span text:style-name="T76">+ </text:span><text:span text:style-name="T60">（最左）</text:span></text:p>
          </table:table-cell>
          <table:table-cell table:style-name="表格27.A2" office:value-type="string">
            <text:p text:style-name="Standard" loext:marker-style-name="T59"><text:span text:style-name="T105">Pop 6</text:span><text:span text:style-name="T76">, Pop 4</text:span><text:span text:style-name="T60">，計算 </text:span><text:span text:style-name="T105">6</text:span><text:span text:style-name="T76">+4=10</text:span><text:span text:style-name="T60">，</text:span><text:span text:style-name="T76">Push 10</text:span></text:p>
          </table:table-cell>
          <table:table-cell table:style-name="表格27.A2" office:value-type="string">
            <text:p text:style-name="Standard" loext:marker-style-name="T59"><text:span text:style-name="T76">[10]</text:span><text:span text:style-name="T59"/></text:p>
          </table:table-cell>
        </table:table-row>
        <table:table-row table:style-name="表格27.1">
          <table:table-cell table:style-name="表格27.A7" office:value-type="string">
            <text:p text:style-name="Standard" loext:marker-style-name="T135"><text:span text:style-name="T134">結果</text:span><text:span text:style-name="T135"/>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Standard" loext:marker-style-name="T135"><text:span text:style-name="T140">★ </text:span><text:span text:style-name="T134">答案 </text:span><text:span text:style-name="T140">= 10</text:span></text:p>
          </table:table-cell>
        </table:table-row>
      </table:table>
      <text:p text:style-name="P6"/>
      <text:h text:style-name="P12" text:outline-level="2" loext:marker-style-name="T30"><text:span text:style-name="T30">Postfix → Expression Tree</text:span><text:span text:style-name="T30"/></text:h>
      <text:p text:style-name="P25" loext:marker-style-name="T46"><text:span text:style-name="T45">看到運算元建節點放 </text:span><text:span text:style-name="T63">Stack</text:span><text:span text:style-name="T45">，看到運算子取出兩棵子樹合併。</text:span></text:p>
      <text:p text:style-name="P3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24"><text:span text:style-name="T24">範例：AB+C*</text:span><text:span text:style-name="T24"/></text:p>
            <text:p text:style-name="P39" loext:marker-style-name="T46"><text:span text:style-name="T63">① </text:span><text:span text:style-name="T45">看到 </text:span><text:span text:style-name="T63">A → </text:span><text:span text:style-name="T45">建節點 </text:span><text:span text:style-name="T63">A</text:span><text:span text:style-name="T45">，</text:span><text:span text:style-name="T63">Push</text:span></text:p>
            <text:p text:style-name="P36" loext:marker-style-name="T46"><text:span text:style-name="T63">② </text:span><text:span text:style-name="T45">看到 </text:span><text:span text:style-name="T63">B → </text:span><text:span text:style-name="T45">建節點 </text:span><text:span text:style-name="T63">B</text:span><text:span text:style-name="T45">，</text:span><text:span text:style-name="T63">Push</text:span></text:p>
            <text:p text:style-name="P36" loext:marker-style-name="T46"><text:span text:style-name="T63">③ </text:span><text:span text:style-name="T45">看到 </text:span><text:span text:style-name="T63">+ → Pop B</text:span><text:span text:style-name="T45">（右子樹），</text:span><text:span text:style-name="T63">Pop A</text:span><text:span text:style-name="T45">（左子樹），建 </text:span><text:span text:style-name="T63">+ </text:span><text:span text:style-name="T45">節點，</text:span><text:span text:style-name="T63">Push </text:span><text:span text:style-name="T45">這棵小樹</text:span></text:p>
            <text:p text:style-name="P36" loext:marker-style-name="T46"><text:span text:style-name="T63">④ </text:span><text:span text:style-name="T45">看到 </text:span><text:span text:style-name="T63">C → </text:span><text:span text:style-name="T45">建節點 </text:span><text:span text:style-name="T63">C</text:span><text:span text:style-name="T45">，</text:span><text:span text:style-name="T63">Push</text:span></text:p>
            <text:p text:style-name="P37" loext:marker-style-name="T46"><text:span text:style-name="T63">⑤ </text:span><text:span text:style-name="T45">看到 </text:span><text:span text:style-name="T63">* → Pop C</text:span><text:span text:style-name="T45">（右子樹），</text:span><text:span text:style-name="T63">Pop +</text:span><text:span text:style-name="T45">樹（左子樹），建 </text:span><text:span text:style-name="T63">* </text:span><text:span text:style-name="T45">根節點</text:span></text:p>
            <text:p text:style-name="P31" loext:marker-style-name="T34"><text:span text:style-name="T33">結果：根為 </text:span><text:span text:style-name="T43">*</text:span><text:span text:style-name="T33">，左子樹為 </text:span><text:span text:style-name="T43">+</text:span><text:span text:style-name="T33">（左</text:span><text:span text:style-name="T43">A</text:span><text:span text:style-name="T33">右</text:span><text:span text:style-name="T43">B</text:span><text:span text:style-name="T33">），右子樹為 </text:span><text:span text:style-name="T43">C</text:span></text:p>
          </table:table-cell>
        </table:table-row>
      </table:table>
      <text:p text:style-name="Standard"/>
      <text:p text:style-name="P40">核心邏輯：為什麼這樣做？</text:p>
      <text:p text:style-name="P42">後綴式 AB+C* 已經內含所有優先權資訊。藉由 Stack 逐步讀取後綴式，運算元建節點，運算子合併子樹，最後得到完整的運算式樹。這個過程自動構建樹的結構，無需額外考慮優先權或括號。</text:p>
      <text:p text:style-name="P41">逐步詳細示範：AB+C*</text:p>
      <text:p text:style-name="P44">步驟 1：看到 A</text:p>
      <text:p text:style-name="P43">建一個節點 A，Push 進 Stack</text:p>
      <text:p text:style-name="P45">Stack：[A]</text:p>
      <text:p text:style-name="P44">步驟 2：看到 B</text:p>
      <text:p text:style-name="P43">建一個節點 B，Push 進 Stack</text:p>
      <text:p text:style-name="P45">Stack：[A, B]</text:p>
      <text:p text:style-name="P44">步驟 3：看到 +（運算子！）</text:p>
      <text:p text:style-name="P43">Pop B（右子樹）→ Pop A（左子樹）→ 建 + 節點連接 A 和 B → Push 這棵小樹</text:p>
      <text:p text:style-name="P45">Stack：[ <text:s/>+ <text:s/>] <text:s/>其中 + 的左子樹是 A，右子樹是 B</text:p>
      <text:p text:style-name="P44">步驟 4：看到 C</text:p>
      <text:p text:style-name="P43">建一個節點 C，Push 進 Stack</text:p>
      <text:p text:style-name="P45">Stack：[ <text:s/>+ <text:s/>, C]</text:p>
      <text:p text:style-name="P44">步驟 5：看到 *（最後的運算子！）</text:p>
      <text:p text:style-name="P43">Pop C（右子樹）→ Pop +樹（左子樹）→ 建 * 根節點連接兩者 → Push 回去</text:p>
      <text:p text:style-name="P45">Stack：[ <text:s text:c="7"/>* <text:s text:c="7"/>] <text:s/>← 完整的運算式樹！</text:p>
      <text:p text:style-name="P45"><text:s text:c="10"/>/ <text:s text:c="2"/>\\ <text:s/>其中左子樹是 (A+B)，右子樹是 C</text:p>
      <text:p text:style-name="P45"><text:s text:c="9"/>+ <text:s text:c="4"/>C</text:p>
      <text:p text:style-name="P45"><text:s text:c="8"/>/ \\</text:p>
      <text:p text:style-name="P45"><text:s text:c="7"/>A <text:s text:c="2"/>B</text:p>
      <text:p text:style-name="Standard"/>
      <text:p text:style-name="P41">演算法總結</text:p>
      <text:p text:style-name="P42">✓ 看到運算元（A、B、C 等）→ 建節點 Push</text:p>
      <text:p text:style-name="P42">✓ 看到運算子（+、-、×、÷）→ Pop 兩棵子樹 → 組合成新樹 → Push 回 Stack</text:p>
      <text:p text:style-name="P42">✓ 讀完後綴式 → Stack 裡剩下的就是完整的運算式樹</text:p>
      <text:p text:style-name="Standard"/>
      <text:p text:style-name="P47">⭐ 關鍵領悟</text:p>
      <text:p text:style-name="P42">為什麼後綴式最適合用 Stack 建樹？因為後綴式裡，每個運算子出現時，它的兩個運算元（或子樹）已經準備好了！無需往前往後查找，只要按順序處理即可。這就是電腦最喜歡的方式。</text:p>
      <text:p text:style-name="Standard"/>
      <text:p text:style-name="P41">與中置式的比較</text:p>
      <text:p text:style-name="P46">中置式：(A+B)*C</text:p>
      <text:p text:style-name="P42">→ 需要考慮括號、優先權，建樹時得往前往後掃描</text:p>
      <text:p text:style-name="P46">後置式：AB+C*</text:p>
      <text:p text:style-name="P42">→ 線性掃描一次，用 Stack 自動組合，簡潔高效！</text:p>
      <text:h text:style-name="P15" text:outline-level="1" loext:marker-style-name="T13"><text:span text:style-name="T12"/></text:h>
      <text:h text:style-name="P14" text:outline-level="1" loext:marker-style-name="T13"><text:span text:style-name="T12">第八部分：考試速記總整理</text:span><text:span text:style-name="T13"/></text:h>
      <text:p text:style-name="P2"/>
      <text:h text:style-name="P12" text:outline-level="2" loext:marker-style-name="T30"><text:span text:style-name="T29">六大必背考點（重要度排序）</text:span><text:span text:style-name="T30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Standard" loext:marker-style-name="T4"><text:span text:style-name="T3">重要度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考點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關鍵記憶</text:span><text:span text:style-name="T4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1"><text:span text:style-name="T77">★★★★★</text:span><text:span text:style-name="T61"/></text:p>
          </table:table-cell>
          <table:table-cell table:style-name="表格29.A2" office:value-type="string">
            <text:p text:style-name="P5" loext:marker-style-name="T61"><text:span text:style-name="T77">Postfix </text:span><text:span text:style-name="T62">用 </text:span><text:span text:style-name="T77">Stack </text:span><text:span text:style-name="T62">求值</text:span></text:p>
          </table:table-cell>
          <table:table-cell table:style-name="表格29.A2" office:value-type="string">
            <text:p text:style-name="P5" loext:marker-style-name="T61"><text:span text:style-name="T62">從左往右，運算元 </text:span><text:span text:style-name="T77">Push</text:span><text:span text:style-name="T62">，運算子 </text:span><text:span text:style-name="T77">Pop </text:span><text:span text:style-name="T62">兩個計算</text:span></text:p>
          </table:table-cell>
        </table:table-row>
        <table:table-row table:style-name="表格29.1">
          <table:table-cell table:style-name="表格29.A2" office:value-type="string">
            <text:p text:style-name="P5" loext:marker-style-name="T61"><text:span text:style-name="T77">★★★★★</text:span><text:span text:style-name="T61"/></text:p>
          </table:table-cell>
          <table:table-cell table:style-name="表格29.A2" office:value-type="string">
            <text:p text:style-name="P5" loext:marker-style-name="T61"><text:span text:style-name="T77">Infix → Postfix </text:span><text:span text:style-name="T62">轉換</text:span></text:p>
          </table:table-cell>
          <table:table-cell table:style-name="表格29.A2" office:value-type="string">
            <text:p text:style-name="P5" loext:marker-style-name="T61"><text:span text:style-name="T62">五條規則（括號、優先權、左結合）</text:span><text:span text:style-name="T61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1"><text:span text:style-name="T77">★★★★★</text:span><text:span text:style-name="T61"/></text:p>
          </table:table-cell>
          <table:table-cell table:style-name="表格29.A2" office:value-type="string">
            <text:p text:style-name="P5" loext:marker-style-name="T61"><text:span text:style-name="T77">Preorder = Prefix</text:span><text:span text:style-name="T61"/></text:p>
            <text:p text:style-name="P5" loext:marker-style-name="T61"><text:span text:style-name="T77">Inorder = Infix</text:span><text:span text:style-name="T61"/></text:p>
            <text:p text:style-name="P5" loext:marker-style-name="T61"><text:span text:style-name="T77">Postorder = Postfix</text:span><text:span text:style-name="T61"/></text:p>
          </table:table-cell>
          <table:table-cell table:style-name="表格29.A2" office:value-type="string">
            <text:p text:style-name="P5" loext:marker-style-name="T61"><text:span text:style-name="T62">走訪方式 ↔ 表示法對應</text:span><text:span text:style-name="T61"/></text:p>
          </table:table-cell>
        </table:table-row>
        <table:table-row table:style-name="表格29.1">
          <table:table-cell table:style-name="表格29.A5" office:value-type="string">
            <text:p text:style-name="P5" loext:marker-style-name="T61"><text:span text:style-name="T77">★★★★☆</text:span><text:span text:style-name="T61"/></text:p>
          </table:table-cell>
          <table:table-cell table:style-name="表格29.A5" office:value-type="string">
            <text:p text:style-name="P5" loext:marker-style-name="T61"><text:span text:style-name="T77">Expression Tree </text:span><text:span text:style-name="T62">建樹</text:span></text:p>
          </table:table-cell>
          <table:table-cell table:style-name="表格29.A5" office:value-type="string">
            <text:p text:style-name="P5" loext:marker-style-name="T61"><text:span text:style-name="T62">找最後算的運算子 </text:span><text:span text:style-name="T77">= </text:span><text:span text:style-name="T62">根節點，遞迴拆解</text:span></text:p>
          </table:table-cell>
        </table:table-row>
        <table:table-row table:style-name="表格29.1">
          <table:table-cell table:style-name="表格29.A5" office:value-type="string">
            <text:p text:style-name="P5" loext:marker-style-name="T61"><text:span text:style-name="T77">★★★★☆</text:span><text:span text:style-name="T61"/></text:p>
          </table:table-cell>
          <table:table-cell table:style-name="表格29.A5" office:value-type="string">
            <text:p text:style-name="P5" loext:marker-style-name="T61"><text:span text:style-name="T77">Prefix </text:span><text:span text:style-name="T62">用 </text:span><text:span text:style-name="T77">Stack </text:span><text:span text:style-name="T62">求值</text:span></text:p>
          </table:table-cell>
          <table:table-cell table:style-name="表格29.A5" office:value-type="string">
            <text:p text:style-name="P5" loext:marker-style-name="T61"><text:span text:style-name="T62">從右往左，先 </text:span><text:span text:style-name="T77">Pop </text:span><text:span text:style-name="T62">的是左運算元</text:span></text:p>
          </table:table-cell>
        </table:table-row>
        <table:table-row table:style-name="表格29.1">
          <table:table-cell table:style-name="表格29.A7" office:value-type="string">
            <text:p text:style-name="P5" loext:marker-style-name="T61"><text:span text:style-name="T77">★★★☆☆</text:span><text:span text:style-name="T61"/></text:p>
          </table:table-cell>
          <table:table-cell table:style-name="表格29.A7" office:value-type="string">
            <text:p text:style-name="P5" loext:marker-style-name="T61"><text:span text:style-name="T77">Postfix → Expression Tree</text:span><text:span text:style-name="T61"/></text:p>
          </table:table-cell>
          <table:table-cell table:style-name="表格29.A7" office:value-type="string">
            <text:p text:style-name="P5" loext:marker-style-name="T61"><text:span text:style-name="T62">運算元建節點 </text:span><text:span text:style-name="T77">Push</text:span><text:span text:style-name="T62">，運算子合併兩棵子樹</text:span></text:p>
          </table:table-cell>
        </table:table-row>
      </table:table>
      <text:p text:style-name="P6"/>
      <text:h text:style-name="P12" text:outline-level="2" loext:marker-style-name="T30"><text:span text:style-name="T30">Infix → Postfix </text:span><text:span text:style-name="T29">考前速記卡</text:span>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7" loext:marker-style-name="T25"><text:span text:style-name="T25">1. Operand（運算元） → 直接輸出</text:span><text:span text:style-name="T25"/></text:p>
            <text:p text:style-name="P36" loext:marker-style-name="T25"><text:span text:style-name="T25">2. <text:s/>( <text:s/>→ Push</text:span><text:span text:style-name="T25"/></text:p>
            <text:p text:style-name="P36" loext:marker-style-name="T25"><text:span text:style-name="T25">3. <text:s/>) <text:s/>→ Pop 直到 (（括號不輸出）</text:span><text:span text:style-name="T25"/></text:p>
            <text:p text:style-name="P36" loext:marker-style-name="T25"><text:span text:style-name="T25">4. Operator → Stack 頂優先 ≥ 自己 → 先 Pop，再 Push</text:span><text:span text:style-name="T25"/></text:p>
            <text:p text:style-name="P37" loext:marker-style-name="T25"><text:span text:style-name="T25">5. 讀完 → Stack 全部 Pop 輸出</text:span><text:span text:style-name="T25"/></text:p>
          </table:table-cell>
        </table:table-row>
      </table:table>
      <text:p text:style-name="P10"/>
      <text:h text:style-name="P12" text:outline-level="2" loext:marker-style-name="T30"><text:span text:style-name="T29">三種表示法互轉速查表</text:span><text:span text:style-name="T30"/>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Standard" loext:marker-style-name="T6"><text:span text:style-name="T5">表示法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算式範例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特點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求值方法</text:span><text:span text:style-name="T6"/></text:p>
          </table:table-cell>
        </table:table-row>
        <table:table-row table:style-name="表格31.1">
          <table:table-cell table:style-name="表格31.A2" office:value-type="string">
            <text:p text:style-name="Standard" loext:marker-style-name="T61"><text:span text:style-name="T77">Prefix </text:span><text:span text:style-name="T62">前置式</text:span></text:p>
          </table:table-cell>
          <table:table-cell table:style-name="表格31.A2" office:value-type="string">
            <text:p text:style-name="Standard" loext:marker-style-name="T61"><text:span text:style-name="T77">+AB</text:span><text:span text:style-name="T61"/></text:p>
          </table:table-cell>
          <table:table-cell table:style-name="表格31.A2" office:value-type="string">
            <text:p text:style-name="Standard" loext:marker-style-name="T61"><text:span text:style-name="T62">運算子在前</text:span><text:span text:style-name="T61"/></text:p>
          </table:table-cell>
          <table:table-cell table:style-name="表格31.A2" office:value-type="string">
            <text:p text:style-name="Standard" loext:marker-style-name="T61"><text:span text:style-name="T77">Stack</text:span><text:span text:style-name="T62">，從右往左讀</text:span></text:p>
          </table:table-cell>
        </table:table-row>
        <table:table-row table:style-name="表格31.1">
          <table:table-cell table:style-name="表格31.A3" office:value-type="string">
            <text:p text:style-name="Standard" loext:marker-style-name="T61"><text:span text:style-name="T77">Infix </text:span><text:span text:style-name="T62">中置式</text:span></text:p>
          </table:table-cell>
          <table:table-cell table:style-name="表格31.A3" office:value-type="string">
            <text:p text:style-name="Standard" loext:marker-style-name="T61"><text:span text:style-name="T77">A+B</text:span><text:span text:style-name="T61"/></text:p>
          </table:table-cell>
          <table:table-cell table:style-name="表格31.A3" office:value-type="string">
            <text:p text:style-name="Standard" loext:marker-style-name="T61"><text:span text:style-name="T62">人類習慣寫法，需括號</text:span><text:span text:style-name="T61"/></text:p>
          </table:table-cell>
          <table:table-cell table:style-name="表格31.A3" office:value-type="string">
            <text:p text:style-name="Standard" loext:marker-style-name="T61"><text:span text:style-name="T62">需考慮優先權</text:span><text:span text:style-name="T61"/></text:p>
          </table:table-cell>
        </table:table-row>
        <table:table-row table:style-name="表格31.1">
          <table:table-cell table:style-name="表格31.A4" office:value-type="string">
            <text:p text:style-name="Standard" loext:marker-style-name="T61"><text:span text:style-name="T77">Postfix </text:span><text:span text:style-name="T62">後置式</text:span></text:p>
          </table:table-cell>
          <table:table-cell table:style-name="表格31.A4" office:value-type="string">
            <text:p text:style-name="Standard" loext:marker-style-name="T61"><text:span text:style-name="T77">AB+</text:span><text:span text:style-name="T61"/></text:p>
          </table:table-cell>
          <table:table-cell table:style-name="表格31.A4" office:value-type="string">
            <text:p text:style-name="Standard" loext:marker-style-name="T61"><text:span text:style-name="T62">無括號，電腦最愛</text:span><text:span text:style-name="T61"/></text:p>
          </table:table-cell>
          <table:table-cell table:style-name="表格31.A4" office:value-type="string">
            <text:p text:style-name="Standard" loext:marker-style-name="T61"><text:span text:style-name="T77">Stack</text:span><text:span text:style-name="T62">，從左往右讀</text:span>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48" loext:marker-style-name="T23"><text:span text:style-name="T22">最終核心記憶句（一句話串起整章）</text:span><text:span text:style-name="T23"/></text:p>
            <text:p text:style-name="P24" loext:marker-style-name="T40"><text:span text:style-name="T39">「</text:span><text:span text:style-name="T44">Expression Tree </text:span><text:span text:style-name="T39">求值 </text:span><text:span text:style-name="T44">= Postorder </text:span><text:span text:style-name="T39">走訪 </text:span><text:span text:style-name="T44">= Postfix </text:span><text:span text:style-name="T39">計算 </text:span><text:span text:style-name="T44">= Stack</text:span><text:span text:style-name="T39">」</text:span></text:p>
            <text:p text:style-name="P49" loext:marker-style-name="T46"><text:span text:style-name="T45">只要懂這一句，整章 </text:span><text:span text:style-name="T63">Expression Tree </text:span><text:span text:style-name="T45">的題目就全部打通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0T01:48:15</meta:creation-date>
    <meta:initial-creator>Un-named</meta:initial-creator>
    <dc:language>en-US</dc:language>
    <dc:date>2026-06-11T12:13:28.934000000</dc:date>
    <meta:editing-cycles>79</meta:editing-cycles>
    <meta:editing-duration>PT11H53M40S</meta:editing-duration>
    <meta:generator>MODA_ODF_Application_Tools/3.8.4.2$Windows_X86_64 LibreOffice_project/4fb77107d5af14329e08085efe4fa19b5633383a</meta:generator>
    <meta:document-statistic meta:table-count="32" meta:image-count="0" meta:object-count="0" meta:page-count="14" meta:paragraph-count="570" meta:word-count="3861" meta:character-count="7047" meta:non-whitespace-character-count="5743"/>
    <meta:user-defined meta:name="AppVersion">15.0000</meta:user-defined>
  </office:meta>
</office:document-meta>
</file>