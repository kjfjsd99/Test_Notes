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3.879cm"/>
    </style:style>
    <style:style style:name="表格1.B" style:family="table-column">
      <style:table-column-properties style:column-width="3.528cm"/>
    </style:style>
    <style:style style:name="表格1.C" style:family="table-column">
      <style:table-column-properties style:column-width="3.669cm"/>
    </style:style>
    <style:style style:name="表格1.D" style:family="table-column">
      <style:table-column-properties style:column-width="2.787cm"/>
    </style:style>
    <style:style style:name="表格1.E" style:family="table-column">
      <style:table-column-properties style:column-width="2.64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.B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1.D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.B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2" style:family="table">
      <style:table-properties style:width="10.583cm" fo:margin-left="0.002cm" fo:margin-top="0cm" fo:margin-bottom="0cm" table:align="left" style:writing-mode="page"/>
    </style:style>
    <style:style style:name="表格2.A" style:family="table-column">
      <style:table-column-properties style:column-width="5.29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2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.374cm"/>
    </style:style>
    <style:style style:name="表格3.B" style:family="table-column">
      <style:table-column-properties style:column-width="1.834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2.293cm"/>
    </style:style>
    <style:style style:name="表格3.F" style:family="table-column">
      <style:table-column-properties style:column-width="6.59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3.D1" style:family="table-cell">
      <style:table-cell-properties style:vertical-align="middle" fo:background-color="#e040fb" fo:padding-left="0.265cm" fo:padding-right="0.265cm" fo:padding-top="0.141cm" fo:padding-bottom="0.141cm" fo:border="0.1pt solid #1f3864">
        <style:background-image/>
      </style:table-cell-properties>
    </style:style>
    <style:style style:name="表格3.E1" style:family="table-cell">
      <style:table-cell-properties style:vertical-align="middle" fo:background-color="#f50057" fo:padding-left="0.265cm" fo:padding-right="0.265cm" fo:padding-top="0.141cm" fo:padding-bottom="0.141cm" fo:border="0.1pt solid #1f3864">
        <style:background-image/>
      </style:table-cell-properties>
    </style:style>
    <style:style style:name="表格3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.D2" style:family="table-cell">
      <style:table-cell-properties style:vertical-align="middle" fo:background-color="#e040fb" fo:padding-left="0.265cm" fo:padding-right="0.265cm" fo:padding-top="0.141cm" fo:padding-bottom="0.141cm" fo:border="0.1pt solid #cccccc">
        <style:background-image/>
      </style:table-cell-properties>
    </style:style>
    <style:style style:name="表格3.E2" style:family="table-cell">
      <style:table-cell-properties style:vertical-align="middle" fo:background-color="#f50057" fo:padding-left="0.265cm" fo:padding-right="0.265cm" fo:padding-top="0.141cm" fo:padding-bottom="0.141cm" fo:border="0.1pt solid #cccccc">
        <style:background-image/>
      </style:table-cell-properties>
    </style:style>
    <style:style style:name="表格3.F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3.F4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0.583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4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4.C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.178cm"/>
    </style:style>
    <style:style style:name="表格6.B" style:family="table-column">
      <style:table-column-properties style:column-width="1.18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7f8c8d" fo:padding-left="0.265cm" fo:padding-right="0.265cm" fo:padding-top="0.141cm" fo:padding-bottom="0.141cm" fo:border="0.1pt solid #7f8c8d">
        <style:background-image/>
      </style:table-cell-properties>
    </style:style>
    <style:style style:name="表格6.B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6.A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6.B2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6.C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6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.411cm"/>
    </style:style>
    <style:style style:name="表格7.B" style:family="table-column">
      <style:table-column-properties style:column-width="3.879cm"/>
    </style:style>
    <style:style style:name="表格7.C" style:family="table-column">
      <style:table-column-properties style:column-width="6.632cm"/>
    </style:style>
    <style:style style:name="表格7.D" style:family="table-column">
      <style:table-column-properties style:column-width="2.117cm"/>
    </style:style>
    <style:style style:name="表格7.E" style:family="table-column">
      <style:table-column-properties style:column-width="2.471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7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7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7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7.A15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7.D15" style:family="table-cell">
      <style:table-cell-properties style:vertical-align="middle" fo:background-color="#1f7a4d" fo:padding-left="0.265cm" fo:padding-right="0.265cm" fo:padding-top="0.141cm" fo:padding-bottom="0.141cm" fo:border="0.1pt solid #1f7a4d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.411cm"/>
    </style:style>
    <style:style style:name="表格8.B" style:family="table-column">
      <style:table-column-properties style:column-width="3.879cm"/>
    </style:style>
    <style:style style:name="表格8.C" style:family="table-column">
      <style:table-column-properties style:column-width="6.632cm"/>
    </style:style>
    <style:style style:name="表格8.D" style:family="table-column">
      <style:table-column-properties style:column-width="2.117cm"/>
    </style:style>
    <style:style style:name="表格8.E" style:family="table-column">
      <style:table-column-properties style:column-width="2.47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abc9c" fo:padding-left="0.265cm" fo:padding-right="0.265cm" fo:padding-top="0.141cm" fo:padding-bottom="0.141cm" fo:border="0.1pt solid #1abc9c">
        <style:background-image/>
      </style:table-cell-properties>
    </style:style>
    <style:style style:name="表格8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8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8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8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0.583cm" fo:margin-left="0.002cm" fo:margin-top="0cm" fo:margin-bottom="0cm" table:align="left" style:writing-mode="page"/>
    </style:style>
    <style:style style:name="表格9.A" style:family="table-column">
      <style:table-column-properties style:column-width="3.52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9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9.C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9.C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2.438cm"/>
    </style:style>
    <style:style style:name="表格10.B" style:family="table-column">
      <style:table-column-properties style:column-width="1.877cm"/>
    </style:style>
    <style:style style:name="表格10.D" style:family="table-column">
      <style:table-column-properties style:column-width="1.875cm"/>
    </style:style>
    <style:style style:name="表格10.H" style:family="table-column">
      <style:table-column-properties style:column-width="2.81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0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0.G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0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0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.A5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5.928cm"/>
    </style:style>
    <style:style style:name="表格11.C" style:family="table-column">
      <style:table-column-properties style:column-width="6.3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1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1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3.879cm"/>
    </style:style>
    <style:style style:name="表格12.B" style:family="table-column">
      <style:table-column-properties style:column-width="12.631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2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2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4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5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6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7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8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9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0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1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.235cm"/>
    </style:style>
    <style:style style:name="表格5.B" style:family="table-column">
      <style:table-column-properties style:column-width="1.762cm"/>
    </style:style>
    <style:style style:name="表格5.C" style:family="table-column">
      <style:table-column-properties style:column-width="1.94cm"/>
    </style:style>
    <style:style style:name="表格5.D" style:family="table-column">
      <style:table-column-properties style:column-width="2.293cm"/>
    </style:style>
    <style:style style:name="表格5.G" style:family="table-column">
      <style:table-column-properties style:column-width="4.69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5.A2" style:family="table-cell">
      <style:table-cell-properties style:vertical-align="middle" fo:background-color="#f0e6ff" fo:padding-left="0.265cm" fo:padding-right="0.265cm" fo:padding-top="0.141cm" fo:padding-bottom="0.141cm" fo:border="0.1pt solid #cccccc">
        <style:background-image/>
      </style:table-cell-properties>
    </style:style>
    <style:style style:name="表格5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.G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3" style:family="table">
      <style:table-properties style:width="14.111cm" fo:margin-left="0.002cm" fo:margin-top="0cm" fo:margin-bottom="0cm" table:align="left" style:writing-mode="page"/>
    </style:style>
    <style:style style:name="表格13.A" style:family="table-column">
      <style:table-column-properties style:column-width="3.528cm"/>
    </style:style>
    <style:style style:name="表格13.D" style:family="table-column">
      <style:table-column-properties style:column-width="3.526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3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3.4" style:family="table-row">
      <style:table-row-properties style:min-row-height="1.277cm" fo:keep-together="auto"/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.198cm"/>
    </style:style>
    <style:style style:name="表格14.B" style:family="table-column">
      <style:table-column-properties style:column-width="1.554cm"/>
    </style:style>
    <style:style style:name="表格14.C" style:family="table-column">
      <style:table-column-properties style:column-width="1.552cm"/>
    </style:style>
    <style:style style:name="表格14.D" style:family="table-column">
      <style:table-column-properties style:column-width="2.117cm"/>
    </style:style>
    <style:style style:name="表格14.G" style:family="table-column">
      <style:table-column-properties style:column-width="5.854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e67e22" fo:padding-left="0.265cm" fo:padding-right="0.265cm" fo:padding-top="0.141cm" fo:padding-bottom="0.141cm" fo:border="0.1pt solid #e67e22">
        <style:background-image/>
      </style:table-cell-properties>
    </style:style>
    <style:style style:name="表格14.A2" style:family="table-cell">
      <style:table-cell-properties style:vertical-align="middle" fo:background-color="#fff3e0" fo:padding-left="0.265cm" fo:padding-right="0.265cm" fo:padding-top="0.141cm" fo:padding-bottom="0.141cm" fo:border="0.1pt solid #cccccc">
        <style:background-image/>
      </style:table-cell-properties>
    </style:style>
    <style:style style:name="表格14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4.G2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.198cm"/>
    </style:style>
    <style:style style:name="表格15.B" style:family="table-column">
      <style:table-column-properties style:column-width="1.554cm"/>
    </style:style>
    <style:style style:name="表格15.C" style:family="table-column">
      <style:table-column-properties style:column-width="1.552cm"/>
    </style:style>
    <style:style style:name="表格15.D" style:family="table-column">
      <style:table-column-properties style:column-width="2.117cm"/>
    </style:style>
    <style:style style:name="表格15.G" style:family="table-column">
      <style:table-column-properties style:column-width="5.854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e67e22" fo:padding-left="0.265cm" fo:padding-right="0.265cm" fo:padding-top="0.141cm" fo:padding-bottom="0.141cm" fo:border="0.1pt solid #e67e22">
        <style:background-image/>
      </style:table-cell-properties>
    </style:style>
    <style:style style:name="表格15.A2" style:family="table-cell">
      <style:table-cell-properties style:vertical-align="middle" fo:background-color="#fff3e0" fo:padding-left="0.265cm" fo:padding-right="0.265cm" fo:padding-top="0.141cm" fo:padding-bottom="0.141cm" fo:border="0.1pt solid #cccccc">
        <style:background-image/>
      </style:table-cell-properties>
    </style:style>
    <style:style style:name="表格15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5.G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6" style:family="table">
      <style:table-properties style:width="14.111cm" fo:margin-left="0.002cm" fo:margin-top="0cm" fo:margin-bottom="0cm" table:align="left" style:writing-mode="page"/>
    </style:style>
    <style:style style:name="表格16.A" style:family="table-column">
      <style:table-column-properties style:column-width="4.939cm"/>
    </style:style>
    <style:style style:name="表格16.B" style:family="table-column">
      <style:table-column-properties style:column-width="9.1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6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6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4.128cm"/>
    </style:style>
    <style:style style:name="表格17.D" style:family="table-column">
      <style:table-column-properties style:column-width="4.126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7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7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7.A3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4.128cm"/>
    </style:style>
    <style:style style:name="表格18.B" style:family="table-column">
      <style:table-column-properties style:column-width="6.191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8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8.B6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8.C6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706cm" fo:margin-bottom="0cm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41cm" fo:margin-bottom="0cm" style:contextual-spacing="false"/>
    </style:style>
    <style:style style:name="P4" style:family="paragraph" style:parent-style-name="Standard">
      <style:paragraph-properties fo:margin-top="0.282cm" fo:margin-bottom="0cm" style:contextual-spacing="false"/>
    </style:style>
    <style:style style:name="P5" style:family="paragraph" style:parent-style-name="Standard">
      <style:paragraph-properties fo:margin-top="0.071cm" fo:margin-bottom="0cm" style:contextual-spacing="false"/>
    </style:style>
    <style:style style:name="P6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</style:style>
    <style:style style:name="P7" style:family="paragraph" style:parent-style-name="Standard">
      <loext:graphic-properties draw:fill="solid" draw:fill-color="#d6e4f0"/>
      <style:paragraph-properties fo:margin-left="0.635cm" fo:margin-right="0cm" fo:margin-top="0.141cm" fo:margin-bottom="0.141cm" style:contextual-spacing="false" fo:text-indent="0cm" style:auto-text-indent="false" fo:background-color="#d6e4f0" fo:padding="0cm" fo:border-left="1.76pt solid #e67e22" fo:border-right="none" fo:border-top="none" fo:border-bottom="none"/>
    </style:style>
    <style:style style:name="P8" style:family="paragraph" style:parent-style-name="Standard">
      <loext:graphic-properties draw:fill="solid" draw:fill-color="#fff0f0"/>
      <style:paragraph-properties fo:margin-left="0.635cm" fo:margin-right="0cm" fo:margin-top="0.141cm" fo:margin-bottom="0.141cm" style:contextual-spacing="false" fo:text-indent="0cm" style:auto-text-indent="false" fo:background-color="#fff0f0"/>
    </style:style>
    <style:style style:name="P9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</style:style>
    <style:style style:name="P10" style:family="paragraph" style:parent-style-name="Heading_20_2">
      <loext:graphic-properties draw:fill="solid" draw:fill-color="#c0392b"/>
      <style:paragraph-properties fo:margin-left="0.212cm" fo:margin-right="0cm" fo:margin-top="0.494cm" fo:margin-bottom="0.247cm" style:contextual-spacing="false" fo:text-indent="0cm" style:auto-text-indent="false" fo:background-color="#c0392b"/>
    </style:style>
    <style:style style:name="P11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0e9d54"/>
    </style:style>
    <style:style style:name="P12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51pt solid #e67e22"/>
    </style:style>
    <style:style style:name="P13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4" style:family="paragraph" style:parent-style-name="Heading_20_2">
      <loext:graphic-properties draw:fill="solid" draw:fill-color="#1abc9c"/>
      <style:paragraph-properties fo:margin-left="0.212cm" fo:margin-right="0cm" fo:margin-top="0.494cm" fo:margin-bottom="0.247cm" style:contextual-spacing="false" fo:text-indent="0cm" style:auto-text-indent="false" fo:background-color="#1abc9c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5" style:family="paragraph" style:parent-style-name="Heading_20_2">
      <loext:graphic-properties draw:fill="solid" draw:fill-color="#e67e22"/>
      <style:paragraph-properties fo:margin-left="0.212cm" fo:margin-right="0cm" fo:margin-top="0.494cm" fo:margin-bottom="0.247cm" style:contextual-spacing="false" fo:text-indent="0cm" style:auto-text-indent="false" fo:background-color="#e67e22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Heading_20_2">
      <loext:graphic-properties draw:fill="solid" draw:fill-color="#8e44ad"/>
      <style:paragraph-properties fo:margin-left="0.212cm" fo:margin-right="0cm" fo:margin-top="0.494cm" fo:margin-bottom="0.247cm" style:contextual-spacing="false" fo:text-indent="0cm" style:auto-text-indent="false" fo:background-color="#8e44ad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 fo:padding="0cm" fo:border-left="none" fo:border-right="none" fo:border-top="none" fo:border-bottom="0.99pt solid #e67e22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8" style:family="paragraph" style:parent-style-name="Standard">
      <loext:graphic-properties draw:fill="solid" draw:fill-color="#1f3864"/>
      <style:paragraph-properties fo:margin-top="0.353cm" fo:margin-bottom="0.176cm" style:contextual-spacing="false" fo:text-align="center" style:justify-single-word="false" fo:background-color="#1f3864"/>
      <style:text-properties fo:color="#ffffff" loext:opacity="100%" style:font-name="Arial" fo:font-size="32pt" fo:font-weight="bold" style:font-name-asian="Arial2" style:font-size-asian="32pt" style:font-weight-asian="bold" style:font-name-complex="Arial2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0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1" style:family="paragraph" style:parent-style-name="Standard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2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officeooo:paragraph-rsid="002d80af" style:font-name-asian="Arial2" style:font-size-asian="11pt" style:font-name-complex="Arial2" style:font-size-complex="11pt"/>
    </style:style>
    <style:style style:name="P23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margin-top="0.176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26" style:family="paragraph" style:parent-style-name="Standard">
      <style:paragraph-properties fo:text-align="center" style:justify-single-word="false"/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7f8c8d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P28" style:family="paragraph" style:parent-style-name="Standard">
      <style:paragraph-properties fo:text-align="center" style:justify-single-word="false"/>
      <style:text-properties fo:color="#7f8c8d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29" style:family="paragraph" style:parent-style-name="Standard">
      <style:paragraph-properties fo:margin-top="0.212cm" fo:margin-bottom="0cm" style:contextual-spacing="false" fo:text-align="center" style:justify-single-word="false"/>
      <style:text-properties fo:color="#7f8c8d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30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2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normal" officeooo:paragraph-rsid="003975d0" style:font-name-asian="Arial2" style:font-size-asian="11pt" style:font-weight-asian="normal" style:font-name-complex="Arial2" style:font-size-complex="11pt" style:font-weight-complex="normal"/>
    </style:style>
    <style:style style:name="P37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38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officeooo:paragraph-rsid="00240211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2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44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2077ac"/>
    </style:style>
    <style:style style:name="P45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background-color="#ffc400"/>
    </style:style>
    <style:style style:name="P46" style:family="paragraph" style:parent-style-name="Standard">
      <loext:graphic-properties draw:fill="solid" draw:fill-color="#f50057" draw:opacity="100%"/>
      <style:paragraph-properties fo:text-align="center" style:justify-single-word="false" fo:background-color="#f50057"/>
      <style:text-properties fo:color="#eeff4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ffc400" loext:opacity="100%" style:font-name="Arial" fo:font-size="11pt" fo:font-weight="normal" fo:background-color="#000000" style:font-name-asian="Arial2" style:font-size-asian="11pt" style:font-weight-asian="normal" style:font-name-complex="Arial2" style:font-size-complex="11pt" style:font-weight-complex="normal"/>
    </style:style>
    <style:style style:name="P48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  <style:text-properties officeooo:paragraph-rsid="0071fcd4"/>
    </style:style>
    <style:style style:name="P49" style:family="paragraph" style:parent-style-name="Heading_20_2">
      <loext:graphic-properties draw:fill="solid" draw:fill-color="#8e44ad"/>
      <style:paragraph-properties fo:margin-left="0.212cm" fo:margin-right="0cm" fo:margin-top="0.494cm" fo:margin-bottom="0.247cm" style:contextual-spacing="false" fo:text-indent="0cm" style:auto-text-indent="false" fo:background-color="#8e44ad"/>
      <style:text-properties officeooo:paragraph-rsid="0071fcd4"/>
    </style:style>
    <style:style style:name="P50" style:family="paragraph" style:parent-style-name="Heading_20_2">
      <loext:graphic-properties draw:fill="solid" draw:fill-color="#e67e22"/>
      <style:paragraph-properties fo:margin-left="0.212cm" fo:margin-right="0cm" fo:margin-top="0.494cm" fo:margin-bottom="0.247cm" style:contextual-spacing="false" fo:text-indent="0cm" style:auto-text-indent="false" fo:background-color="#e67e22"/>
      <style:text-properties officeooo:paragraph-rsid="0071fcd4"/>
    </style:style>
    <style:style style:name="P51" style:family="paragraph" style:parent-style-name="List_20_Paragraph" style:list-style-name="WWNum2">
      <style:paragraph-properties fo:margin-top="0.071cm" fo:margin-bottom="0.071cm" style:contextual-spacing="false"/>
    </style:style>
    <style:style style:name="P52" style:family="paragraph" style:parent-style-name="List_20_Paragraph" style:list-style-name="WWNum2">
      <style:paragraph-properties fo:margin-top="0.071cm" fo:margin-bottom="0.071cm" style:contextual-spacing="false"/>
      <style:text-properties officeooo:paragraph-rsid="0071fcd4"/>
    </style:style>
    <style:style style:name="P53" style:family="paragraph" style:parent-style-name="List_20_Paragraph" style:list-style-name="WWNum2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54" style:family="paragraph" style:parent-style-name="List_20_Paragraph" style:list-style-name="WWNum3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55" style:family="paragraph" style:parent-style-name="List_20_Paragraph" style:list-style-name="WWNum3">
      <style:paragraph-properties fo:margin-top="0.071cm" fo:margin-bottom="0.071cm" style:contextual-spacing="false"/>
      <style:text-properties officeooo:paragraph-rsid="0071fcd4"/>
    </style:style>
    <style:style style:name="P56" style:family="paragraph" style:parent-style-name="Standard">
      <style:paragraph-properties fo:text-align="center" style:justify-single-word="false"/>
      <style:text-properties fo:font-weight="bold" officeooo:paragraph-rsid="0071fcd4" fo:background-color="#ffff00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weight="bold" officeooo:paragraph-rsid="0071fcd4" fo:background-color="#ffc400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officeooo:paragraph-rsid="0071fcd4"/>
    </style:style>
    <style:style style:name="P59" style:family="paragraph" style:parent-style-name="Standard">
      <style:paragraph-properties fo:text-align="center" style:justify-single-word="false"/>
      <style:text-properties officeooo:paragraph-rsid="008fb5e4"/>
    </style:style>
    <style:style style:name="P60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officeooo:paragraph-rsid="0071fcd4"/>
    </style:style>
    <style:style style:name="P61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71fcd4"/>
    </style:style>
    <style:style style:name="P62" style:family="paragraph" style:parent-style-name="Standard">
      <style:paragraph-properties fo:margin-top="0.071cm" fo:margin-bottom="0cm" style:contextual-spacing="false"/>
      <style:text-properties officeooo:paragraph-rsid="0071fcd4"/>
    </style:style>
    <style:style style:name="P63" style:family="paragraph" style:parent-style-name="Standard">
      <loext:graphic-properties draw:fill="solid" draw:fill-color="#d6e4f0"/>
      <style:paragraph-properties fo:margin-left="0.635cm" fo:margin-right="0cm" fo:margin-top="0.141cm" fo:margin-bottom="0.141cm" style:contextual-spacing="false" fo:text-indent="0cm" style:auto-text-indent="false" fo:background-color="#d6e4f0" fo:padding="0cm" fo:border-left="1.76pt solid #e67e22" fo:border-right="none" fo:border-top="none" fo:border-bottom="none"/>
      <style:text-properties officeooo:paragraph-rsid="0071fcd4"/>
    </style:style>
    <style:style style:name="P64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officeooo:paragraph-rsid="0071fcd4"/>
    </style:style>
    <style:style style:name="P65" style:family="paragraph" style:parent-style-name="Standard">
      <loext:graphic-properties draw:fill="solid" draw:fill-color="#fff0f0"/>
      <style:paragraph-properties fo:margin-left="0.635cm" fo:margin-right="0cm" fo:margin-top="0.141cm" fo:margin-bottom="0.141cm" style:contextual-spacing="false" fo:text-indent="0cm" style:auto-text-indent="false" fo:background-color="#fff0f0"/>
      <style:text-properties officeooo:paragraph-rsid="0071fcd4"/>
    </style:style>
    <style:style style:name="P66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officeooo:paragraph-rsid="0071fcd4"/>
    </style:style>
    <style:style style:name="P67" style:family="paragraph" style:parent-style-name="Standard">
      <style:paragraph-properties fo:text-align="center" style:justify-single-word="false"/>
      <style:text-properties officeooo:paragraph-rsid="0071fcd4" fo:background-color="#ffff00"/>
    </style:style>
    <style:style style:name="P68" style:family="paragraph" style:parent-style-name="Standard">
      <style:paragraph-properties fo:text-align="center" style:justify-single-word="false"/>
      <style:text-properties officeooo:paragraph-rsid="0071fcd4" fo:background-color="#ffc400"/>
    </style:style>
    <style:style style:name="P69" style:family="paragraph" style:parent-style-name="Standard">
      <style:paragraph-properties fo:text-align="center" style:justify-single-word="false"/>
      <style:text-properties officeooo:paragraph-rsid="0071fcd4" fo:background-color="#18ffff"/>
    </style:style>
    <style:style style:name="T1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e67e22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9" style:family="text">
      <style:text-properties fo:color="#e67e22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e67e22" loext:opacity="100%" style:font-name="Courier New" fo:font-size="11pt" style:font-name-asian="Courier New1" style:font-size-asian="11pt" style:font-name-complex="Courier New1" style:font-size-complex="11pt"/>
    </style:style>
    <style:style style:name="T1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15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16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17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18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19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20" style:family="text">
      <style:text-properties fo:color="#1a1a1a" loext:opacity="100%" style:font-name="Arial" fo:font-size="11pt" fo:background-color="#ffffff" loext:char-shading-value="0" style:font-name-asian="Arial2" style:font-size-asian="11pt" style:font-name-complex="Arial2" style:font-size-complex="11pt"/>
    </style:style>
    <style:style style:name="T21" style:family="text">
      <style:text-properties fo:color="#1a1a1a" loext:opacity="100%" style:font-name="Arial" fo:font-size="11pt" fo:background-color="#ffd740" loext:char-shading-value="0" style:font-name-asian="Arial2" style:font-size-asian="11pt" style:font-name-complex="Arial2" style:font-size-complex="11pt"/>
    </style:style>
    <style:style style:name="T22" style:family="text">
      <style:text-properties fo:color="#1a1a1a" loext:opacity="100%" style:font-name="Arial" fo:font-size="11pt" fo:background-color="#18ffff" loext:char-shading-value="0" style:font-name-asian="Arial2" style:font-size-asian="11pt" style:font-name-complex="Arial2" style:font-size-complex="11pt"/>
    </style:style>
    <style:style style:name="T23" style:family="text"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24" style:family="text"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25" style:family="text">
      <style:text-properties fo:color="#1a1a1a" loext:opacity="100%" style:font-name="Arial" fo:font-size="11pt" fo:font-weight="normal" fo:background-color="#18ffff" loext:char-shading-value="0" style:font-name-asian="Arial2" style:font-size-asian="11pt" style:font-weight-asian="normal" style:font-name-complex="Arial2" style:font-size-complex="11pt" style:font-weight-complex="normal"/>
    </style:style>
    <style:style style:name="T26" style:family="text">
      <style:text-properties fo:color="#1a1a1a" loext:opacity="100%" style:font-name="Arial" fo:font-size="11pt" fo:font-weight="normal" fo:background-color="#18ffff" loext:char-shading-value="0" style:font-name-asian="Arial2" style:font-size-asian="11pt" style:font-weight-asian="normal" style:font-name-complex="Arial2" style:font-size-complex="11pt" style:font-weight-complex="normal"/>
    </style:style>
    <style:style style:name="T27" style:family="text">
      <style:text-properties fo:color="#1a1a1a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8" style:family="text">
      <style:text-properties fo:color="#1a1a1a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1a1a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30" style:family="text">
      <style:text-properties fo:color="#1a1a1a" loext:opacity="100%" style:font-name="Arial" fo:font-size="11pt" fo:background-color="#ff4081" loext:char-shading-value="0" style:font-name-asian="Arial2" style:font-size-asian="11pt" style:font-name-complex="Arial2" style:font-size-complex="11pt"/>
    </style:style>
    <style:style style:name="T31" style:family="text">
      <style:text-properties fo:color="#1a1a1a" loext:opacity="100%" style:font-name="Arial" fo:font-size="11pt" fo:background-color="#ff4081" loext:char-shading-value="0" style:font-name-asian="Arial2" style:font-size-asian="11pt" style:font-name-complex="Arial2" style:font-size-complex="11pt"/>
    </style:style>
    <style:style style:name="T32" style:family="text">
      <style:text-properties fo:color="#1a1a1a" loext:opacity="100%" style:font-name="Arial" fo:font-size="11pt" fo:background-color="#76ff03" loext:char-shading-value="0" style:font-name-asian="Arial2" style:font-size-asian="11pt" style:font-name-complex="Arial2" style:font-size-complex="11pt"/>
    </style:style>
    <style:style style:name="T33" style:family="text">
      <style:text-properties fo:color="#1a1a1a" loext:opacity="100%" style:font-name="Arial" fo:font-size="11pt" fo:background-color="#76ff03" loext:char-shading-value="0" style:font-name-asian="Arial2" style:font-size-asian="11pt" style:font-name-complex="Arial2" style:font-size-complex="11pt"/>
    </style:style>
    <style:style style:name="T34" style:family="text"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27ae60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37" style:family="text">
      <style:text-properties fo:color="#27ae60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38" style:family="text">
      <style:text-properties fo:color="#27ae60" loext:opacity="100%" style:font-name="Arial" fo:font-size="11pt" fo:font-weight="bold" fo:background-color="#8d6e63" loext:char-shading-value="0" style:font-name-asian="Arial2" style:font-size-asian="11pt" style:font-weight-asian="bold" style:font-name-complex="Arial2" style:font-size-complex="11pt" style:font-weight-complex="bold"/>
    </style:style>
    <style:style style:name="T39" style:family="text">
      <style:text-properties fo:color="#27ae60" loext:opacity="100%" style:font-name="Arial" fo:font-size="11pt" fo:font-weight="bold" fo:background-color="#eeff41" loext:char-shading-value="0" style:font-name-asian="Arial2" style:font-size-asian="11pt" style:font-weight-asian="bold" style:font-name-complex="Arial2" style:font-size-complex="11pt" style:font-weight-complex="bold"/>
    </style:style>
    <style:style style:name="T40" style:family="text">
      <style:text-properties fo:color="#27ae60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41" style:family="text">
      <style:text-properties fo:color="#27ae60" loext:opacity="100%" style:font-name="Arial" fo:font-size="11pt" fo:font-weight="normal" fo:background-color="#1a1a1a" loext:char-shading-value="0" style:font-name-asian="Arial2" style:font-size-asian="11pt" style:font-weight-asian="normal" style:font-name-complex="Arial2" style:font-size-complex="11pt" style:font-weight-complex="normal"/>
    </style:style>
    <style:style style:name="T42" style:family="text">
      <style:text-properties fo:color="#27ae60" loext:opacity="100%" style:font-name="Arial" fo:font-size="11pt" fo:font-weight="normal" fo:background-color="#1a1a1a" loext:char-shading-value="0" style:font-name-asian="Arial2" style:font-size-asian="11pt" style:font-weight-asian="normal" style:font-name-complex="Arial2" style:font-size-complex="11pt" style:font-weight-complex="normal"/>
    </style:style>
    <style:style style:name="T43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c0392b" loext:opacity="100%" style:font-name="Arial" fo:font-size="11pt" style:font-name-asian="Arial2" style:font-size-asian="11pt" style:font-name-complex="Arial2" style:font-size-complex="11pt"/>
    </style:style>
    <style:style style:name="T46" style:family="text">
      <style:text-properties fo:color="#c0392b" loext:opacity="100%" style:font-name="Arial" fo:font-size="11pt" style:font-name-asian="Arial2" style:font-size-asian="11pt" style:font-name-complex="Arial2" style:font-size-complex="11pt"/>
    </style:style>
    <style:style style:name="T47" style:family="text">
      <style:text-properties fo:color="#8e44a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8e44a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1abc9c" loext:opacity="100%" style:font-name="Courier New" fo:font-size="11pt" style:font-name-asian="Courier New1" style:font-size-asian="11pt" style:font-name-complex="Courier New1" style:font-size-complex="11pt"/>
    </style:style>
    <style:style style:name="T50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51" style:family="text">
      <style:text-properties fo:color="#18ffff" loext:opacity="100%" style:font-name="Arial" fo:font-size="11pt" style:font-name-asian="Arial2" style:font-size-asian="11pt" style:font-name-complex="Arial2" style:font-size-complex="11pt"/>
    </style:style>
    <style:style style:name="T52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53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18ffff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55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56" style:family="text">
      <style:text-properties fo:color="#18ffff" loext:opacity="100%" style:font-name="Arial" fo:font-size="11pt" fo:font-weight="bold" fo:background-color="#e040fb" loext:char-shading-value="0" style:font-name-asian="Arial2" style:font-size-asian="11pt" style:font-weight-asian="bold" style:font-name-complex="Arial2" style:font-size-complex="11pt" style:font-weight-complex="bold"/>
    </style:style>
    <style:style style:name="T57" style:family="text">
      <style:text-properties fo:color="#18ffff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8" style:family="text">
      <style:text-properties fo:color="#18ffff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fo:color="#18ffff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60" style:family="text">
      <style:text-properties fo:color="#18ffff" loext:opacity="100%" style:font-name="Arial" fo:font-size="11pt" fo:background-color="#d500f9" loext:char-shading-value="0" style:font-name-asian="Arial2" style:font-size-asian="11pt" style:font-name-complex="Arial2" style:font-size-complex="11pt"/>
    </style:style>
    <style:style style:name="T61" style:family="text">
      <style:text-properties fo:color="#18ffff" loext:opacity="100%" style:font-name="Arial" fo:font-size="11pt" fo:background-color="#d500f9" loext:char-shading-value="0" style:font-name-asian="Arial2" style:font-size-asian="11pt" style:font-name-complex="Arial2" style:font-size-complex="11pt"/>
    </style:style>
    <style:style style:name="T62" style:family="text">
      <style:text-properties fo:color="#18ffff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63" style:family="text">
      <style:text-properties fo:color="#18ffff" loext:opacity="100%" style:font-name="Arial" fo:font-size="11pt" fo:font-weight="normal" fo:background-color="#1a1a1a" loext:char-shading-value="0" style:font-name-asian="Arial2" style:font-size-asian="11pt" style:font-weight-asian="normal" style:font-name-complex="Arial2" style:font-size-complex="11pt" style:font-weight-complex="normal"/>
    </style:style>
    <style:style style:name="T64" style:family="text">
      <style:text-properties fo:color="#18ffff" loext:opacity="100%" style:font-name="Arial" fo:font-size="11pt" fo:font-weight="normal" fo:background-color="#1a1a1a" loext:char-shading-value="0" style:font-name-asian="Arial2" style:font-size-asian="11pt" style:font-weight-asian="normal" style:font-name-complex="Arial2" style:font-size-complex="11pt" style:font-weight-complex="normal"/>
    </style:style>
    <style:style style:name="T6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6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68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69" style:family="text">
      <style:text-properties fo:color="#18ffff" loext:opacity="100%" fo:font-size="12pt" fo:font-weight="bold" fo:background-color="#d500f9" loext:char-shading-value="0" style:font-size-asian="12pt" style:font-weight-asian="bold" style:font-size-complex="12pt" style:font-weight-complex="bold"/>
    </style:style>
    <style:style style:name="T70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71" style:family="text">
      <style:text-properties fo:color="#ffd740" loext:opacity="100%" fo:font-size="12pt" fo:font-weight="bold" fo:background-color="#4a4a4a" loext:char-shading-value="0" style:font-size-asian="12pt" style:font-weight-asian="bold" style:font-size-complex="12pt" style:font-weight-complex="bold"/>
    </style:style>
    <style:style style:name="T72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73" style:family="text">
      <style:text-properties fo:color="#ff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74" style:family="text">
      <style:text-properties fo:color="#ffff00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75" style:family="text">
      <style:text-properties fo:color="#ffff00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76" style:family="text">
      <style:text-properties fo:color="#ffff00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77" style:family="text">
      <style:text-properties fo:color="#fff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8" style:family="text">
      <style:text-properties fo:color="#ffff00" loext:opacity="100%" style:font-name="Arial" fo:font-size="11pt" style:font-name-asian="Arial2" style:font-size-asian="11pt" style:font-name-complex="Arial2" style:font-size-complex="11pt"/>
    </style:style>
    <style:style style:name="T79" style:family="text">
      <style:text-properties fo:color="#ffff00" loext:opacity="100%" style:font-name="Arial" fo:font-size="11pt" fo:background-color="#ffc400" loext:char-shading-value="0" style:font-name-asian="Arial2" style:font-size-asian="11pt" style:font-name-complex="Arial2" style:font-size-complex="11pt"/>
    </style:style>
    <style:style style:name="T80" style:family="text">
      <style:text-properties fo:color="#ffff00" loext:opacity="100%" style:font-name="Arial" fo:font-size="11pt" fo:background-color="#ffc400" loext:char-shading-value="0" style:font-name-asian="Arial2" style:font-size-asian="11pt" style:font-name-complex="Arial2" style:font-size-complex="11pt"/>
    </style:style>
    <style:style style:name="T81" style:family="text">
      <style:text-properties fo:color="#ffff00" loext:opacity="100%" fo:font-size="12pt" fo:font-weight="bold" fo:background-color="#f50057" loext:char-shading-value="0" style:font-size-asian="12pt" style:font-weight-asian="bold" style:font-size-complex="12pt" style:font-weight-complex="bold"/>
    </style:style>
    <style:style style:name="T8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3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84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85" style:family="text">
      <style:text-properties fo:color="#1de9b6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86" style:family="text">
      <style:text-properties fo:color="#1de9b6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87" style:family="text">
      <style:text-properties fo:color="#1de9b6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88" style:family="text">
      <style:text-properties fo:color="#1de9b6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1de9b6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90" style:family="text">
      <style:text-properties fo:color="#1de9b6" loext:opacity="100%" fo:font-size="12pt" fo:font-weight="bold" fo:background-color="#4a4a4a" loext:char-shading-value="0" style:font-size-asian="12pt" style:font-weight-asian="bold" style:font-size-complex="12pt" style:font-weight-complex="bold"/>
    </style:style>
    <style:style style:name="T91" style:family="text">
      <style:text-properties fo:background-color="#ffff00" loext:char-shading-value="0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fo:background-color="#ffc400" loext:char-shading-value="0" style:font-weight-asian="bold" style:font-weight-complex="bold"/>
    </style:style>
    <style:style style:name="T94" style:family="text">
      <style:text-properties fo:font-weight="bold" fo:background-color="#ffff00" loext:char-shading-value="0" style:font-weight-asian="bold" style:font-weight-complex="bold"/>
    </style:style>
    <style:style style:name="T95" style:family="text">
      <style:text-properties fo:font-weight="bold" fo:background-color="#18ffff" loext:char-shading-value="0" style:font-weight-asian="bold" style:font-weight-complex="bold"/>
    </style:style>
    <style:style style:name="T96" style:family="text">
      <style:text-properties fo:font-weight="bold" fo:background-color="#b2ff59" loext:char-shading-value="0" style:font-weight-asian="bold" style:font-weight-complex="bold"/>
    </style:style>
    <style:style style:name="T97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98" style:family="text">
      <style:text-properties fo:color="#76ff03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76ff03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00" style:family="text">
      <style:text-properties fo:color="#76ff03" loext:opacity="100%" style:font-name="Arial" fo:font-size="11pt" fo:font-weight="normal" fo:background-color="#1a1a1a" loext:char-shading-value="0" style:font-name-asian="Arial2" style:font-size-asian="11pt" style:font-weight-asian="normal" style:font-name-complex="Arial2" style:font-size-complex="11pt" style:font-weight-complex="normal"/>
    </style:style>
    <style:style style:name="T101" style:family="text">
      <style:text-properties fo:color="#76ff03" loext:opacity="100%" style:font-name="Arial" fo:font-size="11pt" fo:font-weight="normal" fo:background-color="#1a1a1a" loext:char-shading-value="0" style:font-name-asian="Arial2" style:font-size-asian="11pt" style:font-weight-asian="normal" style:font-name-complex="Arial2" style:font-size-complex="11pt" style:font-weight-complex="normal"/>
    </style:style>
    <style:style style:name="T102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03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76ff03" loext:opacity="100%" style:font-name="Courier New" fo:font-size="10pt" style:font-name-asian="Courier New1" style:font-size-asian="10pt" style:font-name-complex="Courier New1" style:font-size-complex="10pt"/>
    </style:style>
    <style:style style:name="T105" style:family="text">
      <style:text-properties fo:color="#76ff03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06" style:family="text">
      <style:text-properties fo:color="#76ff03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07" style:family="text">
      <style:text-properties fo:color="#76ff03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08" style:family="text">
      <style:text-properties fo:color="#f8bbd0" loext:opacity="100%" fo:font-weight="bold" fo:background-color="#5d4037" loext:char-shading-value="0" style:font-weight-asian="bold" style:font-weight-complex="bold"/>
    </style:style>
    <style:style style:name="T109" style:family="text">
      <style:text-properties fo:background-color="#ffd740" loext:char-shading-value="0"/>
    </style:style>
    <style:style style:name="T110" style:family="text">
      <style:text-properties fo:color="#1b3a6b" loext:opacity="100%" fo:font-size="12pt" style:font-size-asian="12pt" style:font-size-complex="12pt"/>
    </style:style>
    <style:style style:name="T11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12" style:family="text">
      <style:text-properties fo:color="#e1bee7" loext:opacity="100%" fo:font-weight="bold" fo:background-color="#5d4037" loext:char-shading-value="0" style:font-weight-asian="bold" style:font-weight-complex="bold"/>
    </style:style>
    <style:style style:name="T113" style:family="text">
      <style:text-properties fo:background-color="#1de9b6" loext:char-shading-value="0"/>
    </style:style>
    <style:style style:name="T114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115" style:family="text">
      <style:text-properties fo:color="#00e676" loext:opacity="100%"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16" style:family="text">
      <style:text-properties fo:color="#00e676" loext:opacity="100%" style:font-name="Arial" fo:font-size="11pt" fo:font-weight="bold" fo:background-color="#1a1a1a" loext:char-shading-value="0" style:font-name-asian="Arial2" style:font-size-asian="11pt" style:font-weight-asian="bold" style:font-name-complex="Arial2" style:font-size-complex="11pt" style:font-weight-complex="bold"/>
    </style:style>
    <style:style style:name="T117" style:family="text">
      <style:text-properties fo:color="#ffee58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118" style:family="text">
      <style:text-properties fo:color="#eeff41" loext:opacity="100%"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119" style:family="text">
      <style:text-properties fo:color="#eeff41" loext:opacity="100%"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20" style:family="text">
      <style:text-properties fo:color="#eeff41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121" style:family="text">
      <style:text-properties fo:color="#eeff41" loext:opacity="100%" style:font-name="Arial" fo:font-size="11pt" fo:font-weight="bold" officeooo:rsid="008fb5e4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122" style:family="text">
      <style:text-properties fo:color="#eeff41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23" style:family="text">
      <style:text-properties fo:color="#eeff41" loext:opacity="100%" style:font-name="Arial" fo:font-size="11pt" fo:background-color="#ff4081" loext:char-shading-value="0" style:font-name-asian="Arial2" style:font-size-asian="11pt" style:font-name-complex="Arial2" style:font-size-complex="11pt"/>
    </style:style>
    <style:style style:name="T124" style:family="text">
      <style:text-properties fo:color="#eeff41" loext:opacity="100%" style:font-name="Arial" fo:font-size="11pt" style:font-name-asian="Arial2" style:font-size-asian="11pt" style:font-name-complex="Arial2" style:font-size-complex="11pt"/>
    </style:style>
    <style:style style:name="T125" style:family="text">
      <style:text-properties fo:color="#eeff41" loext:opacity="100%" style:font-name="Arial" fo:font-size="11pt" fo:background-color="#f50057" loext:char-shading-value="0" style:font-name-asian="Arial2" style:font-size-asian="11pt" style:font-name-complex="Arial2" style:font-size-complex="11pt"/>
    </style:style>
    <style:style style:name="T126" style:family="text">
      <style:text-properties fo:color="#eeff41" loext:opacity="100%" style:font-name="Arial" fo:font-size="11pt" fo:background-color="#f50057" loext:char-shading-value="0" style:font-name-asian="Arial2" style:font-size-asian="11pt" style:font-name-complex="Arial2" style:font-size-complex="11pt"/>
    </style:style>
    <style:style style:name="T127" style:family="text">
      <style:text-properties fo:color="#eeff41" loext:opacity="100%" style:font-name="Courier New" fo:font-size="10pt" style:font-name-asian="Courier New1" style:font-size-asian="10pt" style:font-name-complex="Courier New1" style:font-size-complex="10pt"/>
    </style:style>
    <style:style style:name="T128" style:family="text">
      <style:text-properties fo:color="#eeff41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29" style:family="text">
      <style:text-properties fo:color="#eeff41" loext:opacity="100%" style:font-name="Courier New" fo:font-size="10pt" fo:font-weight="bold" fo:background-color="#ff1744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30" style:family="text">
      <style:text-properties fo:color="#eeff41" loext:opacity="100%" style:font-name="Courier New" fo:font-size="10pt" fo:font-weight="bold" fo:background-color="#ff1744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31" style:family="text">
      <style:text-properties fo:color="#eeff41" loext:opacity="100%" style:font-name="Courier New" fo:font-size="10pt" fo:background-color="#ff1744" loext:char-shading-value="0" style:font-name-asian="Courier New1" style:font-size-asian="10pt" style:font-name-complex="Courier New1" style:font-size-complex="10pt"/>
    </style:style>
    <style:style style:name="T132" style:family="text">
      <style:text-properties fo:color="#eeff41" loext:opacity="100%" style:font-name="Courier New" fo:font-size="10pt" fo:background-color="#ff1744" loext:char-shading-value="0" style:font-name-asian="Courier New1" style:font-size-asian="10pt" style:font-name-complex="Courier New1" style:font-size-complex="10pt"/>
    </style:style>
    <style:style style:name="T133" style:family="text">
      <style:text-properties fo:color="#ff3d00" loext:opacity="100%" style:font-name="Arial" fo:font-size="11pt" style:font-name-asian="Arial2" style:font-size-asian="11pt" style:font-name-complex="Arial2" style:font-size-complex="11pt"/>
    </style:style>
    <style:style style:name="T134" style:family="text">
      <style:text-properties fo:color="#ff3d00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135" style:family="text">
      <style:text-properties fo:color="#ff3d00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136" style:family="text">
      <style:text-properties fo:color="#ff3d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8">搜尋演算法</text:p>
      <text:p text:style-name="P25">Linear / Binary / Ternary Search ＋ 字串比對</text:p>
      <text:p text:style-name="P3"/>
      <text:p text:style-name="P27">完整學習版筆記（超級新手友善）</text:p>
      <text:p text:style-name="P4"/>
      <text:p text:style-name="P30">涵蓋：110高Q3 ／ 113高Q3 ／ 112地Q1 ／ 111關Q4</text:p>
      <text:p text:style-name="P1"/>
      <text:p text:style-name="Standard"/>
      <text:h text:style-name="P17" text:outline-level="1">第一章　搜尋演算法總覽</text:h>
      <text:p text:style-name="P5"/>
      <text:p text:style-name="P32">◆ 什麼是搜尋？</text:p>
      <text:p text:style-name="P20">搜尋演算法（Search Algorithm）是指：在一堆資料中，找出特定目標的方法。</text:p>
      <text:p text:style-name="P20">例如：在 [3, 8, 12, 20, 50] 裡面，找 12 在哪個位置？這就是搜尋。</text:p>
      <text:p text:style-name="P5"/>
      <text:p text:style-name="P32">◆ 三種搜尋法比較總覽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header-rows>
          <table:table-row table:style-name="表格1.1">
            <table:table-cell table:style-name="表格1.A1" office:value-type="string">
              <text:p text:style-name="P19">搜尋法</text:p>
            </table:table-cell>
            <table:table-cell table:style-name="表格1.A1" office:value-type="string">
              <text:p text:style-name="P19">是否需排序</text:p>
            </table:table-cell>
            <table:table-cell table:style-name="表格1.A1" office:value-type="string">
              <text:p text:style-name="P19">時間複雜度</text:p>
            </table:table-cell>
            <table:table-cell table:style-name="表格1.A1" office:value-type="string">
              <text:p text:style-name="P19">最佳</text:p>
            </table:table-cell>
            <table:table-cell table:style-name="表格1.A1" office:value-type="string">
              <text:p text:style-name="P19">最壞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3">Linear Search 線性</text:p>
          </table:table-cell>
          <table:table-cell table:style-name="表格1.B2" office:value-type="string">
            <text:p text:style-name="P23">❌ 不需要</text:p>
          </table:table-cell>
          <table:table-cell table:style-name="表格1.B2" office:value-type="string">
            <text:p text:style-name="P23">O(n)</text:p>
          </table:table-cell>
          <table:table-cell table:style-name="表格1.D2" office:value-type="string">
            <text:p text:style-name="P39">O(1)</text:p>
          </table:table-cell>
          <table:table-cell table:style-name="表格1.E2" office:value-type="string">
            <text:p text:style-name="P41">O(n)</text:p>
          </table:table-cell>
        </table:table-row>
        <table:table-row table:style-name="表格1.1">
          <table:table-cell table:style-name="表格1.A2" office:value-type="string">
            <text:p text:style-name="P33">Binary Search 二元</text:p>
          </table:table-cell>
          <table:table-cell table:style-name="表格1.B3" office:value-type="string">
            <text:p text:style-name="P23">✅ 必須排序</text:p>
          </table:table-cell>
          <table:table-cell table:style-name="表格1.B2" office:value-type="string">
            <text:p text:style-name="P23">O(log n)</text:p>
          </table:table-cell>
          <table:table-cell table:style-name="表格1.D2" office:value-type="string">
            <text:p text:style-name="P39">O(1)</text:p>
          </table:table-cell>
          <table:table-cell table:style-name="表格1.B3" office:value-type="string">
            <text:p text:style-name="P30">O(log n)</text:p>
          </table:table-cell>
        </table:table-row>
        <table:table-row table:style-name="表格1.1">
          <table:table-cell table:style-name="表格1.A2" office:value-type="string">
            <text:p text:style-name="P33">Ternary Search 三元</text:p>
          </table:table-cell>
          <table:table-cell table:style-name="表格1.B2" office:value-type="string">
            <text:p text:style-name="P23">❌ 不需排序（partition型）</text:p>
          </table:table-cell>
          <table:table-cell table:style-name="表格1.B2" office:value-type="string">
            <text:p text:style-name="P23">O(n²)</text:p>
          </table:table-cell>
          <table:table-cell table:style-name="表格1.D2" office:value-type="string">
            <text:p text:style-name="P39">O(n)</text:p>
          </table:table-cell>
          <table:table-cell table:style-name="表格1.E2" office:value-type="string">
            <text:p text:style-name="P41">O(n²)</text:p>
          </table:table-cell>
        </table:table-row>
      </table:table>
      <text:p text:style-name="P5"/>
      <text:p text:style-name="P7"><text:span text:style-name="T6">【考試重點】 </text:span><text:span text:style-name="T15">Linear:O(n)；Binary:O(logn)需排序；Ternary:未排序+partition，最壞O(n²)</text:span></text:p>
      <text:p text:style-name="P5"/>
      <text:p text:style-name="Standard"/>
      <text:h text:style-name="P17" text:outline-level="1">第二章　Linear Search（線性搜尋）</text:h>
      <text:p text:style-name="P5"/>
      <text:p text:style-name="P32">◆ 核心概念</text:p>
      <text:p text:style-name="P20">從第一個資料開始，一個一個往後比對，直到找到目標或全部看完為止。</text:p>
      <text:p text:style-name="P20">中文又叫「循序搜尋」，像是用手指逐行掃描課本找關鍵字。</text:p>
      <text:p text:style-name="P5"/>
      <text:p text:style-name="P32">◆ 圖解步驟</text:p>
      <text:p text:style-name="P20">資料：[5, 9, 2, 7, 11]，目標：找 7</text:p>
      <text:p text:style-name="P6"><text:span text:style-name="T4">Step 1：</text:span><text:span text:style-name="T15">看 5 ≠ 7 → 繼續</text:span></text:p>
      <text:p text:style-name="P6"><text:span text:style-name="T4">Step 2：</text:span><text:span text:style-name="T15">看 9 ≠ 7 → 繼續</text:span></text:p>
      <text:p text:style-name="P6"><text:span text:style-name="T4">Step 3：</text:span><text:span text:style-name="T15">看 2 ≠ 7 → 繼續</text:span></text:p>
      <text:p text:style-name="P6"><text:span text:style-name="T34">Step 4：</text:span><text:span text:style-name="T15">看 7 = 7 → 找到！回傳位置 index 3</text:span></text:p>
      <text:p text:style-name="P5"/>
      <text:p text:style-name="P7"><text:span text:style-name="T6">【為什麼叫「線性」？】 </text:span><text:span text:style-name="T15">因為資料排列成一條直線，搜尋路徑也是直線：1→2→3→4→5</text:span></text:p>
      <text:p text:style-name="P5"/>
      <text:h text:style-name="P13" text:outline-level="2">2-1　迴圈版（適用 Linked List 鏈結串列）</text:h>
      <text:p text:style-name="P37">p = head;</text:p>
      <text:p text:style-name="P37">while (p != NULL) {</text:p>
      <text:p text:style-name="P37"><text:s text:c="4"/>if (p-&gt;data == x) return p; <text:s text:c="2"/>// 找到，回傳指標</text:p>
      <text:p text:style-name="P37"><text:s text:c="4"/>p = p-&gt;next; <text:s text:c="17"/>// 往下一個節點</text:p>
      <text:p text:style-name="P37">}</text:p>
      <text:p text:style-name="P37">return NULL; <text:s text:c="21"/>// 找不到，回傳 NULL</text:p>
      <text:p text:style-name="P5"/>
      <text:p text:style-name="P32">◆ 逐行超白話解釋</text:p>
      <text:p text:style-name="P6"><text:span text:style-name="T4">p = head</text:span><text:span text:style-name="T15">：把指標 p 指向第一個節點，從頭開始走</text:span></text:p>
      <text:p text:style-name="P6"><text:span text:style-name="T4">while (p != NULL)</text:span><text:span text:style-name="T15">：只要還沒走到結尾，就繼續找</text:span></text:p>
      <text:p text:style-name="P6"><text:span text:style-name="T4">p-&gt;data</text:span><text:span text:style-name="T15">：</text:span><text:span text:style-name="T17">取得目前節點所存的資料值</text:span><text:span text:style-name="T15">（-&gt; 是 C 語言存取指標成員的語法）</text:span></text:p>
      <text:p text:style-name="P6"><text:span text:style-name="T4">p-&gt;data == x</text:span><text:span text:style-name="T15">：判斷這個節點的資料是不是我要找的 x</text:span></text:p>
      <text:p text:style-name="P6"><text:span text:style-name="T4">return p</text:span><text:span text:style-name="T15">：找到了，回傳這個節點的記憶體位址</text:span></text:p>
      <text:p text:style-name="P44"><text:span text:style-name="T4">p = p-&gt;next</text:span><text:span text:style-name="T15">：</text:span><text:span text:style-name="T17">把 p 移到下一個節點</text:span><text:span text:style-name="T15">（往前走一步）（</text:span><text:span text:style-name="T54">我自己移到下一格</text:span><text:span text:style-name="T15">）</text:span></text:p>
      <text:p text:style-name="P6"><text:span text:style-name="T4">return NULL</text:span><text:span text:style-name="T15">：</text:span><text:span text:style-name="T17">走完全部都找不到</text:span><text:span text:style-name="T15">，回傳「空」訊號</text:span></text:p>
      <text:p text:style-name="P5"/>
      <text:p text:style-name="P8"><text:span text:style-name="T43">⚠ </text:span><text:span text:style-name="T45">NULL（空指標）= 指標沒有指向任何地方，代表「沒東西了」或「找不到」</text:span></text:p>
      <text:p text:style-name="P5"/>
      <text:p text:style-name="P32">◆ 什麼是 Linked List（鏈結串列）？</text:p>
      <text:p text:style-name="P20">每一個<text:span text:style-name="T93">節點（Node）</text:span>包含<text:span text:style-name="T94">兩個部分</text:span>：</text:p>
      <text:list xml:id="list3201917082" text:style-name="WWNum2">
        <text:list-item text:start-value="1">
          <text:p text:style-name="P53"><text:span text:style-name="T65">data（資料區）</text:span>：存放實際資料，例如數字 5、9、2</text:p>
        </text:list-item>
        <text:list-item>
          <text:p text:style-name="P51"><text:soft-page-break/><text:span text:style-name="T97">next（指標區）</text:span><text:span text:style-name="T15">：</text:span><text:span text:style-name="T20">指向</text:span><text:span text:style-name="T73">下一個節點的</text:span><text:span text:style-name="T52">記憶體位址</text:span></text:p>
        </text:list-item>
      </text:list>
      <text:p text:style-name="P20">結構示意圖：</text:p>
      <text:p text:style-name="P37">[data:5 | next:→] → [data:9 | next:→] → [data:2 | next:→] → NULL</text:p>
      <text:p text:style-name="P5"/>
      <text:h text:style-name="P13" text:outline-level="2">2-2　遞迴版（Recursive）</text:h>
      <text:p text:style-name="P37">linearSearch(<text:span text:style-name="T91">head, x</text:span>) {</text:p>
      <text:p text:style-name="P37"><text:s text:c="4"/>if (head == NULL) <text:s text:c="8"/>return NULL; <text:s/>// 走完找不到</text:p>
      <text:p text:style-name="P37"><text:s text:c="4"/>else if (head-&gt;data == x) return head; <text:s/>// 找到了</text:p>
      <text:p text:style-name="P38"><text:s text:c="4"/>else return linearSearch(head-&gt;next, x);// 繼續找下一個<text:span text:style-name="T15">（</text:span><text:span text:style-name="T54">從下一個節點開始找</text:span><text:span text:style-name="T15">）</text:span></text:p>
      <text:p text:style-name="P37">}</text:p>
      <text:p text:style-name="P5"/>
      <text:p text:style-name="P32">◆ 遞迴呼叫堆疊示範</text:p>
      <text:p text:style-name="P20">資料：5 → 9 → 7 → NULL，目標：找 7</text:p>
      <text:p text:style-name="P6"><text:span text:style-name="T47">第1層：</text:span><text:span text:style-name="T15">linearSearch(</text:span><text:span text:style-name="T21">[5,9,7]</text:span><text:span text:style-name="T15">, 7) → 5≠7 → </text:span><text:span text:style-name="T55">呼叫下一層</text:span></text:p>
      <text:p text:style-name="P6"><text:span text:style-name="T47">第2層：</text:span><text:span text:style-name="T15">linearSearch(</text:span><text:span text:style-name="T21">[9,7]</text:span><text:span text:style-name="T15">, 7) <text:s text:c="2"/>→ 9≠7 → </text:span><text:span text:style-name="T55">呼叫下一層</text:span></text:p>
      <text:p text:style-name="P6"><text:span text:style-name="T34">第3層：</text:span><text:span text:style-name="T15">linearSearch(</text:span><text:span text:style-name="T21">[7]</text:span><text:span text:style-name="T15">, 7) <text:s text:c="4"/>→ 7=7 → return 找到！</text:span></text:p>
      <text:p text:style-name="P20">每一層函式呼叫都會記住「我是從哪裡來的」，找到後逐層回傳結果。</text:p>
      <text:p text:style-name="P5"/>
      <text:h text:style-name="P13" text:outline-level="2">2-3　時間複雜度 O(n)</text:h>
      <text:p text:style-name="P6"><text:span text:style-name="T11">O(n) 的意思：</text:span><text:span text:style-name="T15">有 n 筆資料，最壞情況要</text:span><text:span text:style-name="T17">比較 n 次</text:span><text:span text:style-name="T15">（全部看過一遍）。</text:span></text:p>
      <text:p text:style-name="P20">資料變 2 倍 → 比較次數也大約 2 倍 → 線性成長。</text:p>
      <text:p text:style-name="P22"/>
      <text:p text:style-name="P22">(<text:span text:style-name="T110">Big-O 描述「</text:span><text:span text:style-name="T69">資料量變大</text:span><text:span text:style-name="T71">時，</text:span><text:span text:style-name="T81">演算法工作量</text:span><text:span text:style-name="T90">增加的速度</text:span><text:span text:style-name="T110">」</text:span>)</text:p>
      <text:p text:style-name="P22"/>
      <text:p text:style-name="P5"/>
      <table:table table:name="表格2" table:style-name="表格2">
        <table:table-column table:style-name="表格2.A" table:number-columns-repeated="2"/>
        <table:table-header-rows>
          <table:table-row table:style-name="表格2.1">
            <table:table-cell table:style-name="表格2.A1" office:value-type="string">
              <text:p text:style-name="P19">情況</text:p>
            </table:table-cell>
            <table:table-cell table:style-name="表格2.A1" office:value-type="string">
              <text:p text:style-name="P19">比較次數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3">Best（第一個就找到）</text:p>
          </table:table-cell>
          <table:table-cell table:style-name="表格2.A2" office:value-type="string">
            <text:p text:style-name="P39">O(1)：只比 1 次</text:p>
          </table:table-cell>
        </table:table-row>
        <table:table-row table:style-name="表格2.1">
          <table:table-cell table:style-name="表格2.A3" office:value-type="string">
            <text:p text:style-name="P23">Worst（最後一個或找不到）</text:p>
          </table:table-cell>
          <table:table-cell table:style-name="表格2.A3" office:value-type="string">
            <text:p text:style-name="P41">O(n)：比 n 次</text:p>
          </table:table-cell>
        </table:table-row>
      </table:table>
      <text:p text:style-name="P5"/>
      <text:p text:style-name="Standard"/>
      <text:h text:style-name="P17" text:outline-level="1">第三章　Binary Search（二元搜尋）</text:h>
      <text:p text:style-name="P5"/>
      <text:p text:style-name="P32">◆ 核心概念</text:p>
      <text:p text:style-name="P42">前提：<text:span text:style-name="T91">資料必須已排序！</text:span></text:p>
      <text:p text:style-name="P20"><text:span text:style-name="T111">每次取中間那個值比較</text:span>，<text:span text:style-name="T95">根據比較結果決定往左半邊或右半邊繼續找</text:span>，每次砍掉一半的資料。</text:p>
      <text:p text:style-name="P7"><text:span text:style-name="T6">【為什麼一定要排序？】 </text:span><text:span text:style-name="T74">沒有排序就不知道目標在左邊還是右邊</text:span><text:span text:style-name="T15">，砍掉一半的邏輯會完全失效。</text:span></text:p>
      <text:p text:style-name="P5"/>
      <text:p text:style-name="P32">◆ 圖解步驟</text:p>
      <text:p text:style-name="P20">資料（已排序）：[1, 3, 5, 7, 9, 11, 15]，找 9</text:p>
      <text:p text:style-name="P6"><text:span text:style-name="T4">初始：</text:span><text:span text:style-name="T15">low=0（最左），high=6（最右）</text:span></text:p>
      <text:p text:style-name="P5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column table:style-name="表格3.F"/>
        <table:table-header-rows>
          <table:table-row table:style-name="表格3.1">
            <table:table-cell table:style-name="表格3.A1" office:value-type="string">
              <text:p text:style-name="P19">輪次</text:p>
            </table:table-cell>
            <table:table-cell table:style-name="表格3.A1" office:value-type="string">
              <text:p text:style-name="P19">low</text:p>
            </table:table-cell>
            <table:table-cell table:style-name="表格3.A1" office:value-type="string">
              <text:p text:style-name="P19">high</text:p>
            </table:table-cell>
            <table:table-cell table:style-name="表格3.D1" office:value-type="string">
              <text:p text:style-name="P19">mid</text:p>
            </table:table-cell>
            <table:table-cell table:style-name="表格3.E1" office:value-type="string">
              <text:p text:style-name="P19">key[mid]</text:p>
            </table:table-cell>
            <table:table-cell table:style-name="表格3.A1" office:value-type="string">
              <text:p text:style-name="P19">動作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3">第1輪</text:p>
          </table:table-cell>
          <table:table-cell table:style-name="表格3.B2" office:value-type="string">
            <text:p text:style-name="P23">0</text:p>
          </table:table-cell>
          <table:table-cell table:style-name="表格3.B2" office:value-type="string">
            <text:p text:style-name="P23">6</text:p>
          </table:table-cell>
          <table:table-cell table:style-name="表格3.D2" office:value-type="string">
            <text:p text:style-name="P24">(0+6)/2=3</text:p>
          </table:table-cell>
          <table:table-cell table:style-name="表格3.E2" office:value-type="string">
            <text:p text:style-name="P24">7</text:p>
          </table:table-cell>
          <table:table-cell table:style-name="表格3.F2" office:value-type="string">
            <text:p text:style-name="P35">9&gt;7 → <text:span text:style-name="T91">low=</text:span><text:span text:style-name="T109">mid+1</text:span><text:span text:style-name="T91">=4</text:span>，砍掉左半(<text:span text:style-name="T108">目標值比現中間點大</text:span>)</text:p>
          </table:table-cell>
        </table:table-row>
        <table:table-row table:style-name="表格3.1">
          <table:table-cell table:style-name="表格3.A2" office:value-type="string">
            <text:p text:style-name="P23">第2輪</text:p>
          </table:table-cell>
          <table:table-cell table:style-name="表格3.B2" office:value-type="string">
            <text:p text:style-name="P23">4</text:p>
          </table:table-cell>
          <table:table-cell table:style-name="表格3.B2" office:value-type="string">
            <text:p text:style-name="P23">6</text:p>
          </table:table-cell>
          <table:table-cell table:style-name="表格3.D2" office:value-type="string">
            <text:p text:style-name="P24">(4+6)/2=5</text:p>
          </table:table-cell>
          <table:table-cell table:style-name="表格3.E2" office:value-type="string">
            <text:p text:style-name="P24">11</text:p>
          </table:table-cell>
          <table:table-cell table:style-name="表格3.F2" office:value-type="string">
            <text:p text:style-name="P36">9&lt;11 → <text:span text:style-name="T91">high=</text:span><text:span text:style-name="T109">mid-1</text:span><text:span text:style-name="T91">=4</text:span>，砍掉右半(<text:span text:style-name="T112">目標值比現中間點小</text:span>)</text:p>
          </table:table-cell>
        </table:table-row>
        <table:table-row table:style-name="表格3.1">
          <table:table-cell table:style-name="表格3.A2" office:value-type="string">
            <text:p text:style-name="P23">第3輪</text:p>
          </table:table-cell>
          <table:table-cell table:style-name="表格3.B2" office:value-type="string">
            <text:p text:style-name="P23">4</text:p>
          </table:table-cell>
          <table:table-cell table:style-name="表格3.B2" office:value-type="string">
            <text:p text:style-name="P23">4</text:p>
          </table:table-cell>
          <table:table-cell table:style-name="表格3.D2" office:value-type="string">
            <text:p text:style-name="P24">(4+4)/2=4</text:p>
          </table:table-cell>
          <table:table-cell table:style-name="表格3.E2" office:value-type="string">
            <text:p text:style-name="P24">9</text:p>
          </table:table-cell>
          <table:table-cell table:style-name="表格3.F4" office:value-type="string">
            <text:p text:style-name="P39">9=9 → 找到！回傳 index 4</text:p>
          </table:table-cell>
        </table:table-row>
      </table:table>
      <text:p text:style-name="P5"/>
      <text:h text:style-name="P13" text:outline-level="2">3-1　遞迴版程式碼</text:h>
      <text:p text:style-name="P37">binSearch(key[], <text:span text:style-name="T91">K</text:span>, <text:span text:style-name="T91">low, high</text:span>) {</text:p>
      <text:p text:style-name="P37"><text:s text:c="4"/>if (<text:span text:style-name="T96">low &gt; high</text:span>) <text:s text:c="9"/>return -1; <text:s text:c="9"/>// 找不到</text:p>
      <text:p text:style-name="P37"><text:s text:c="3"/><text:span text:style-name="T66"><text:s/>mid = (low + high) / 2;</text:span></text:p>
      <text:p text:style-name="P37"><text:s text:c="4"/><text:span text:style-name="T91">if (K == key[mid]) <text:s text:c="6"/>return mid; </text:span><text:s text:c="8"/>// 找到，回傳位置</text:p>
      <text:p text:style-name="P37"><text:s text:c="4"/>else if (K &lt; key[mid]) <text:s text:c="2"/><text:span text:style-name="T67">return binSearch</text:span>(key, K, low, <text:span text:style-name="T113">mid-1</text:span>); <text:s/>// 左半</text:p>
      <text:p text:style-name="P37"><text:s text:c="4"/>else <text:s text:c="20"/><text:span text:style-name="T67">return binSearch</text:span>(key, K, <text:span text:style-name="T113">mid+1</text:span>, high); // 右半</text:p>
      <text:p text:style-name="P37">}</text:p>
      <text:p text:style-name="P5"/>
      <text:p text:style-name="P32">◆ 逐行解釋</text:p>
      <text:p text:style-name="P6"><text:span text:style-name="T43">low &gt; high</text:span><text:span text:style-name="T15">：代表搜尋範圍縮到沒了（找不到），回傳 -1 表示「不存在」</text:span></text:p>
      <text:p text:style-name="P45"><text:span text:style-name="T4">mid = (low + high) / 2</text:span><text:span text:style-name="T15">：計算中間位置的 index</text:span></text:p>
      <text:p text:style-name="P6"><text:span text:style-name="T34">K == key[mid]</text:span><text:span text:style-name="T15">：剛好找到了</text:span></text:p>
      <text:p text:style-name="P6"><text:span text:style-name="T4">K &lt; key[mid]</text:span><text:span text:style-name="T15">：</text:span><text:span text:style-name="T17">目標比中間小，往左半邊找</text:span><text:span text:style-name="T15">（</text:span><text:span text:style-name="T22">high 縮小為 mid-1</text:span><text:span text:style-name="T15">）</text:span></text:p>
      <text:p text:style-name="P6"><text:span text:style-name="T4">K &gt; key[mid]</text:span><text:span text:style-name="T15">：</text:span><text:span text:style-name="T17">目標比中間大，往右半邊找</text:span><text:span text:style-name="T15">（</text:span><text:span text:style-name="T22">low 放大為 mid+1</text:span><text:span text:style-name="T15">）</text:span></text:p>
      <text:p text:style-name="P5"/>
      <text:h text:style-name="P9" text:outline-level="2"><text:soft-page-break/><text:span text:style-name="T1">3-2　非遞迴版（while 迴圈）</text:span></text:h>
      <text:p text:style-name="P37">while (<text:span text:style-name="T96">low &lt;= high</text:span>) {</text:p>
      <text:p text:style-name="P37"><text:s text:c="4"/><text:span text:style-name="T66">mid = (low + high) / 2;</text:span></text:p>
      <text:p text:style-name="P37"><text:s text:c="4"/><text:span text:style-name="T91">if (K == key[mid]) <text:s text:c="4"/>return mid;</text:span></text:p>
      <text:p text:style-name="P37"><text:s text:c="4"/>else if (K &lt; key[mid]) <text:span text:style-name="T102">high = mid - 1</text:span>;</text:p>
      <text:p text:style-name="P37"><text:s text:c="4"/>else <text:s text:c="18"/><text:span text:style-name="T102">low <text:s/>= mid + 1</text:span>;</text:p>
      <text:p text:style-name="P37">}</text:p>
      <text:p text:style-name="P37">return -1;</text:p>
      <text:p text:style-name="P5"/>
      <text:p text:style-name="P20"><text:span text:style-name="T114">while 迴圈版和遞迴版的邏輯完全一樣</text:span>，<text:span text:style-name="T82">只是不用呼叫自己</text:span>，改用迴圈反覆執行。</text:p>
      <text:p text:style-name="P20">實際工程上，非遞迴版佔用記憶體較少，執行效率稍高。</text:p>
      <text:p text:style-name="P5"/>
      <text:h text:style-name="P13" text:outline-level="2">3-3　時間複雜度 O(log n)</text:h>
      <text:p text:style-name="P32">◆ O(log n) 從哪裡來？</text:p>
      <text:p text:style-name="P20"><text:span text:style-name="T83">每次搜尋都把範圍縮一半</text:span>，<text:span text:style-name="T68">問最多要砍幾次才剩 1 個元素</text:span>：</text:p>
      <text:p text:style-name="P34">n → n/2 → n/4 → n/8 → ... → 1</text:p>
      <text:p text:style-name="P20">共砍了 k 次後：n ÷ 2ᵏ = 1，所以 k = log₂n。</text:p>
      <text:p text:style-name="P20">也就是說：比較次數 ≈ log₂n，這就是 O(log n)。</text:p>
      <text:p text:style-name="P5"/>
      <table:table table:name="表格4" table:style-name="表格4">
        <table:table-column table:style-name="表格4.A" table:number-columns-repeated="3"/>
        <table:table-header-rows>
          <table:table-row table:style-name="表格4.1">
            <table:table-cell table:style-name="表格4.A1" office:value-type="string">
              <text:p text:style-name="P19">資料筆數 n</text:p>
            </table:table-cell>
            <table:table-cell table:style-name="表格4.A1" office:value-type="string">
              <text:p text:style-name="P19">Linear O(n)最多比</text:p>
            </table:table-cell>
            <table:table-cell table:style-name="表格4.A1" office:value-type="string">
              <text:p text:style-name="P19">Binary O(logn)最多比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23">16</text:p>
          </table:table-cell>
          <table:table-cell table:style-name="表格4.A2" office:value-type="string">
            <text:p text:style-name="P23">16 次</text:p>
          </table:table-cell>
          <table:table-cell table:style-name="表格4.C2" office:value-type="string">
            <text:p text:style-name="P39">4 次</text:p>
          </table:table-cell>
        </table:table-row>
        <table:table-row table:style-name="表格4.1">
          <table:table-cell table:style-name="表格4.A2" office:value-type="string">
            <text:p text:style-name="P23">256</text:p>
          </table:table-cell>
          <table:table-cell table:style-name="表格4.A2" office:value-type="string">
            <text:p text:style-name="P23">256 次</text:p>
          </table:table-cell>
          <table:table-cell table:style-name="表格4.C2" office:value-type="string">
            <text:p text:style-name="P39">8 次</text:p>
          </table:table-cell>
        </table:table-row>
        <table:table-row table:style-name="表格4.1">
          <table:table-cell table:style-name="表格4.A2" office:value-type="string">
            <text:p text:style-name="P23">1,024</text:p>
          </table:table-cell>
          <table:table-cell table:style-name="表格4.A2" office:value-type="string">
            <text:p text:style-name="P23">1,024 次</text:p>
          </table:table-cell>
          <table:table-cell table:style-name="表格4.C2" office:value-type="string">
            <text:p text:style-name="P39">10 次</text:p>
          </table:table-cell>
        </table:table-row>
        <table:table-row table:style-name="表格4.1">
          <table:table-cell table:style-name="表格4.A2" office:value-type="string">
            <text:p text:style-name="P23">1,000,000</text:p>
          </table:table-cell>
          <table:table-cell table:style-name="表格4.A2" office:value-type="string">
            <text:p text:style-name="P23">1,000,000 次</text:p>
          </table:table-cell>
          <table:table-cell table:style-name="表格4.C2" office:value-type="string">
            <text:p text:style-name="P39">僅 20 次！</text:p>
          </table:table-cell>
        </table:table-row>
      </table:table>
      <text:p text:style-name="P5"/>
      <text:p text:style-name="P7"><text:span text:style-name="T6">【為什麼 Binary Search 強？】 </text:span><text:span text:style-name="T15">資料變 100 萬筆，</text:span><text:span text:style-name="T56">Binary 只要比 20 次，Linear 要比 100 萬次！</text:span></text:p>
      <text:p text:style-name="P5"/>
      <text:p text:style-name="Standard"/>
      <text:h text:style-name="P17" text:outline-level="1">第四章　Ternary Search（三元搜尋）</text:h>
      <text:p text:style-name="P5"/>
      <text:p text:style-name="P60"><text:span text:style-name="T13">◆ 核心概念</text:span></text:p>
      <text:p text:style-name="P61"><text:span text:style-name="T15">Ternary Search</text:span><text:span text:style-name="T27"> 把資料切成「三段」</text:span><text:span text:style-name="T15">，使用</text:span><text:span text:style-name="T118">兩個切割點 mid1、mid2</text:span><text:span text:style-name="T15">，</text:span><text:span text:style-name="T116">每次可排除約 1/3 的範圍</text:span><text:span text:style-name="T15">。</text:span></text:p>
      <text:p text:style-name="P61"><text:span text:style-name="T15">考試出現的版本是「partition 型 Ternary Search」：資料不需要預先排序，透過 partition 操作反覆縮小問題規模。</text:span></text:p>
      <text:p text:style-name="P62"/>
      <text:p text:style-name="P63"><text:span text:style-name="T6">【和 Binary 最大的差別】</text:span><text:span text:style-name="T9"> </text:span><text:span text:style-name="T19">Binary Search</text:span><text:span text:style-name="T15"> </text:span><text:span text:style-name="T53">需要已排序 + 切 2 段</text:span><text:span text:style-name="T15">；</text:span><text:span text:style-name="T19">Ternary（partition 型）</text:span><text:span text:style-name="T53">不需排序 + 切 3 段</text:span><text:span text:style-name="T15">，但效率反而更差（</text:span><text:span text:style-name="T28">最壞 O(n²)</text:span><text:span text:style-name="T15">）。</text:span></text:p>
      <text:p text:style-name="P62"/>
      <text:h text:style-name="P48" text:outline-level="2"><text:span text:style-name="T1">4-1　概念圖解：資料怎麼被切成三段？</text:span></text:h>
      <text:p text:style-name="P60"><text:span text:style-name="T13">◆ Binary vs Ternary 切法示意</text:span></text:p>
      <text:p text:style-name="P61"><text:span text:style-name="T4">Binary Search（切 2 段）：</text:span></text:p>
      <text:p text:style-name="P64"><text:span text:style-name="T14"><text:s text:c="2"/>原始範圍：[ <text:s/>1 <text:s text:c="2"/>2 <text:s text:c="2"/>3 <text:s text:c="2"/>4 <text:s text:c="2"/>5 <text:s text:c="2"/>6 <text:s text:c="2"/>7 <text:s text:c="2"/>8 <text:s text:c="2"/>9 <text:s/>]</text:span></text:p>
      <text:p text:style-name="P64"><text:span text:style-name="T14"><text:s text:c="26"/>↑ mid</text:span></text:p>
      <text:p text:style-name="P64"><text:span text:style-name="T14"><text:s text:c="2"/>比較後：只剩左半 或 右半 → </text:span><text:span text:style-name="T130">每次砍掉 1/2</text:span></text:p>
      <text:p text:style-name="P62"/>
      <text:p text:style-name="P61"><text:span text:style-name="T47">Ternary Search（切 3 段）：</text:span></text:p>
      <text:p text:style-name="P64"><text:span text:style-name="T14"><text:s text:c="2"/>原始範圍：[ <text:s/>1 <text:s text:c="2"/>2 <text:s text:c="2"/>3 <text:s text:c="2"/>4 <text:s text:c="2"/>5 <text:s text:c="2"/>6 <text:s text:c="2"/>7 <text:s text:c="2"/>8 <text:s text:c="2"/>9 <text:s/>]</text:span></text:p>
      <text:p text:style-name="P64"><text:span text:style-name="T14"><text:s text:c="19"/>↑ mid1 <text:s text:c="10"/>↑ mid2</text:span></text:p>
      <text:p text:style-name="P64"><text:span text:style-name="T14"><text:s text:c="2"/>切成三塊： [ 左段 ] <text:s/>[ 中段 ] <text:s/>[ 右段 ]</text:span></text:p>
      <text:p text:style-name="P64"><text:span text:style-name="T14"><text:s text:c="2"/>比較後：</text:span><text:span text:style-name="T130">排除其中 1 段</text:span><text:span text:style-name="T14">，</text:span><text:span text:style-name="T107">繼續搜尋剩下 2 段中的 1 段</text:span></text:p>
      <text:p text:style-name="P62"/>
      <text:p text:style-name="P61"><text:span text:style-name="T15">「</text:span><text:span text:style-name="T75">每次切三段，排除一段</text:span><text:span text:style-name="T15">」— 這就是 Ternary Search 的核心動作。</text:span></text:p>
      <text:p text:style-name="P62"/>
      <text:h text:style-name="P48" text:outline-level="2"><text:span text:style-name="T1">4-2　Ternary Search 運作步驟（有序版 / 直覺版）</text:span></text:h>
      <text:p text:style-name="P60"><text:span text:style-name="T13">◆ 範例：在 [1, 3, 5, 7, 9, 11, 13] 中找 11</text:span></text:p>
      <text:p text:style-name="P61"><text:span text:style-name="T15">資料已排序（為了幫助理解切割邏輯，先用有序版說明）</text:span></text:p>
      <text:p text:style-name="P62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 table:number-columns-repeated="3"/>
        <table:table-column table:style-name="表格5.G"/>
        <table:table-header-rows>
          <table:table-row table:style-name="表格5.1">
            <table:table-cell table:style-name="表格5.A1" office:value-type="string">
              <text:p text:style-name="P58"><text:span text:style-name="T3">輪次</text:span></text:p>
            </table:table-cell>
            <table:table-cell table:style-name="表格5.A1" office:value-type="string">
              <text:p text:style-name="P58"><text:span text:style-name="T3">low</text:span></text:p>
            </table:table-cell>
            <table:table-cell table:style-name="表格5.A1" office:value-type="string">
              <text:p text:style-name="P58"><text:span text:style-name="T3">high</text:span></text:p>
            </table:table-cell>
            <table:table-cell table:style-name="表格5.A1" office:value-type="string">
              <text:p text:style-name="P58"><text:span text:style-name="T3">mid1</text:span></text:p>
            </table:table-cell>
            <table:table-cell table:style-name="表格5.A1" office:value-type="string">
              <text:p text:style-name="P58"><text:span text:style-name="T3">mid2</text:span></text:p>
            </table:table-cell>
            <table:table-cell table:style-name="表格5.A1" office:value-type="string">
              <text:p text:style-name="P58"><text:span text:style-name="T3">key[mid1/mid2]</text:span></text:p>
            </table:table-cell>
            <table:table-cell table:style-name="表格5.A1" office:value-type="string">
              <text:p text:style-name="P58"><text:span text:style-name="T3">動作</text:span>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58"><text:span text:style-name="T23">第1輪</text:span></text:p>
          </table:table-cell>
          <table:table-cell table:style-name="表格5.B2" office:value-type="string">
            <text:p text:style-name="P58"><text:span text:style-name="T23">0</text:span></text:p>
          </table:table-cell>
          <table:table-cell table:style-name="表格5.B2" office:value-type="string">
            <text:p text:style-name="P58"><text:span text:style-name="T23">6</text:span></text:p>
          </table:table-cell>
          <table:table-cell table:style-name="表格5.B2" office:value-type="string">
            <text:p text:style-name="P56"><text:span text:style-name="T15">low+(high-low)/3 = 2</text:span></text:p>
          </table:table-cell>
          <table:table-cell table:style-name="表格5.B2" office:value-type="string">
            <text:p text:style-name="P56"><text:span text:style-name="T15">high-(high-low)/3 = 4</text:span></text:p>
          </table:table-cell>
          <table:table-cell table:style-name="表格5.B2" office:value-type="string">
            <text:p text:style-name="P57"><text:span text:style-name="T15">5 / 9</text:span></text:p>
          </table:table-cell>
          <table:table-cell table:style-name="表格5.B2" office:value-type="string">
            <text:p text:style-name="P58"><text:span text:style-name="T58">11&gt;9 (</text:span><text:span text:style-name="T120">要找的目標大於mid2</text:span><text:span text:style-name="T58">)→ 目標在右段</text:span><text:span text:style-name="T23">，</text:span><text:span text:style-name="T98">low = mid2+1 = 5</text:span></text:p>
          </table:table-cell>
        </table:table-row>
        <table:table-row table:style-name="表格5.1">
          <table:table-cell table:style-name="表格5.A2" office:value-type="string">
            <text:p text:style-name="P58"><text:span text:style-name="T23">第2輪</text:span></text:p>
          </table:table-cell>
          <table:table-cell table:style-name="表格5.B2" office:value-type="string">
            <text:p text:style-name="P58"><text:span text:style-name="T23">5</text:span></text:p>
          </table:table-cell>
          <table:table-cell table:style-name="表格5.B2" office:value-type="string">
            <text:p text:style-name="P58"><text:span text:style-name="T23">6</text:span></text:p>
          </table:table-cell>
          <table:table-cell table:style-name="表格5.B2" office:value-type="string">
            <text:p text:style-name="P58"><text:span text:style-name="T23">5+(6-5)/3 = 5</text:span></text:p>
          </table:table-cell>
          <table:table-cell table:style-name="表格5.B2" office:value-type="string">
            <text:p text:style-name="P58"><text:span text:style-name="T23">6-(6-5)/3 = 6</text:span></text:p>
          </table:table-cell>
          <table:table-cell table:style-name="表格5.B2" office:value-type="string">
            <text:p text:style-name="P57"><text:span text:style-name="T15">11 / 13</text:span></text:p>
          </table:table-cell>
          <table:table-cell table:style-name="表格5.G3" office:value-type="string">
            <text:p text:style-name="P59"><text:span text:style-name="T58">11=11</text:span><text:span text:style-name="T36"> </text:span><text:span text:style-name="T58">(</text:span><text:span text:style-name="T120">要找的目標等於</text:span><text:span text:style-name="T122">新</text:span><text:span text:style-name="T120">mid1</text:span><text:span text:style-name="T58">)</text:span><text:span text:style-name="T40">→ </text:span><text:span text:style-name="T39">找到！回傳 index 5</text:span></text:p>
          </table:table-cell>
        </table:table-row>
      </table:table>
      <text:p text:style-name="P62"><text:soft-page-break/></text:p>
      <text:p text:style-name="P61"><text:span text:style-name="T47">mid1 公式：</text:span><text:span text:style-name="T27">low +</text:span><text:span text:style-name="T15"> (high - low) / 3</text:span></text:p>
      <text:p text:style-name="P61"><text:span text:style-name="T47">mid2 公式：</text:span><text:span text:style-name="T27">high -</text:span><text:span text:style-name="T15"> (high - low) / 3</text:span></text:p>
      <text:p text:style-name="P62"/>
      <text:p text:style-name="P65"><text:span text:style-name="T43">⚠ </text:span><text:span text:style-name="T45">這是「有序版」的直覺示範。考試出現的 partition 型不需排序，但切三段的概念相同。</text:span></text:p>
      <text:p text:style-name="P62"/>
      <text:h text:style-name="P49" text:outline-level="2"><text:span text:style-name="T1">4-3　考試版：Partition 型 Ternary Search</text:span></text:h>
      <text:p text:style-name="P60"><text:span text:style-name="T13">◆ 什麼是 Partition（切割）？</text:span></text:p>
      <text:p text:style-name="P61"><text:span text:style-name="T15">Partition 是指：掃描一整組資料，以某個 pivot（基準值）為標準，把資料重新分成三堆：</text:span></text:p>
      <text:p text:style-name="P62"/>
      <table:table table:name="表格13" table:style-name="表格13">
        <table:table-column table:style-name="表格13.A" table:number-columns-repeated="3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58"><text:span text:style-name="T3">堆別</text:span></text:p>
            </table:table-cell>
            <table:table-cell table:style-name="表格13.A1" office:value-type="string">
              <text:p text:style-name="P58"><text:span text:style-name="T3">條件</text:span></text:p>
            </table:table-cell>
            <table:table-cell table:style-name="表格13.A1" office:value-type="string">
              <text:p text:style-name="P58"><text:span text:style-name="T3">放的東西</text:span></text:p>
            </table:table-cell>
            <table:table-cell table:style-name="表格13.A1" office:value-type="string">
              <text:p text:style-name="P58"><text:span text:style-name="T3">下一步</text:span>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67"><text:span text:style-name="T23">左堆</text:span></text:p>
          </table:table-cell>
          <table:table-cell table:style-name="表格13.A2" office:value-type="string">
            <text:p text:style-name="P69"><text:span text:style-name="T23">&lt; pivot1</text:span></text:p>
          </table:table-cell>
          <table:table-cell table:style-name="表格13.A2" office:value-type="string">
            <text:p text:style-name="P58"><text:span text:style-name="T23">比第1個pivot小的</text:span></text:p>
          </table:table-cell>
          <table:table-cell table:style-name="表格13.A2" office:value-type="string">
            <text:p text:style-name="P58"><text:span text:style-name="T23">視情況繼續搜尋</text:span></text:p>
          </table:table-cell>
        </table:table-row>
        <table:table-row table:style-name="表格13.1">
          <table:table-cell table:style-name="表格13.A2" office:value-type="string">
            <text:p text:style-name="P67"><text:span text:style-name="T23">中堆</text:span></text:p>
          </table:table-cell>
          <table:table-cell table:style-name="表格13.A2" office:value-type="string">
            <text:p text:style-name="P68"><text:span text:style-name="T23">pivot1 ≤ x ≤ pivot2</text:span></text:p>
          </table:table-cell>
          <table:table-cell table:style-name="表格13.A2" office:value-type="string">
            <text:p text:style-name="P58"><text:span text:style-name="T23">介於兩個pivot之間的</text:span></text:p>
          </table:table-cell>
          <table:table-cell table:style-name="表格13.A2" office:value-type="string">
            <text:p text:style-name="P58"><text:span text:style-name="T23">視情況繼續搜尋</text:span></text:p>
          </table:table-cell>
        </table:table-row>
        <table:table-row table:style-name="表格13.4">
          <table:table-cell table:style-name="表格13.A2" office:value-type="string">
            <text:p text:style-name="P67"><text:span text:style-name="T23">右堆</text:span></text:p>
          </table:table-cell>
          <table:table-cell table:style-name="表格13.A2" office:value-type="string">
            <text:p text:style-name="P69"><text:span text:style-name="T23">&gt; pivot2</text:span></text:p>
          </table:table-cell>
          <table:table-cell table:style-name="表格13.A2" office:value-type="string">
            <text:p text:style-name="P58"><text:span text:style-name="T23">比第2個pivot大的</text:span></text:p>
          </table:table-cell>
          <table:table-cell table:style-name="表格13.A2" office:value-type="string">
            <text:p text:style-name="P58"><text:span text:style-name="T23">視情況繼續搜尋</text:span></text:p>
          </table:table-cell>
        </table:table-row>
      </table:table>
      <text:p text:style-name="P62"/>
      <text:p text:style-name="P61"><text:span text:style-name="T15">每次 partition 必須掃描所有 n 筆資料（因為你不知道哪個在哪堆），這就是為什麼每層花費 O(n)。</text:span></text:p>
      <text:p text:style-name="P62"/>
      <text:p text:style-name="P60"><text:span text:style-name="T13">◆ Partition 型的具體步驟</text:span></text:p>
      <text:list xml:id="list1917896334" text:style-name="WWNum3">
        <text:list-item text:start-value="1">
          <text:p text:style-name="P55"><text:span text:style-name="T15">從資料中選出兩個 pivot（mid1、mid2）</text:span></text:p>
        </text:list-item>
        <text:list-item>
          <text:p text:style-name="P55"><text:span text:style-name="T15">掃描整個陣列，將所有元素依大小分入左/中/右三堆 → 花費 O(n)</text:span></text:p>
        </text:list-item>
        <text:list-item>
          <text:p text:style-name="P55"><text:span text:style-name="T15">根據</text:span><text:span text:style-name="T120">目標值 K </text:span><text:span text:style-name="T15">決定</text:span><text:span text:style-name="T136">往</text:span><text:span text:style-name="T89">哪一堆</text:span><text:span text:style-name="T136">繼續遞迴搜尋</text:span></text:p>
        </text:list-item>
        <text:list-item>
          <text:p text:style-name="P55"><text:span text:style-name="T28">重複上述步驟</text:span><text:span text:style-name="T15">直到找到目標或資料量縮到 0</text:span></text:p>
        </text:list-item>
      </text:list>
      <text:p text:style-name="P62"/>
      <text:p text:style-name="P60"><text:span text:style-name="T13">◆ Partition 型程式碼（C 語言虛擬碼）</text:span></text:p>
      <text:p text:style-name="P64"><text:span text:style-name="T14">// arr: 資料陣列，low/high: 搜尋範圍，K: 目標值</text:span></text:p>
      <text:p text:style-name="P64"><text:span text:style-name="T14">ternarySearch(arr, low, high, K) {</text:span></text:p>
      <text:p text:style-name="P64"><text:span text:style-name="T14"><text:s text:c="4"/>if (low &gt; high) return -1; <text:s text:c="8"/>// 找不到</text:span></text:p>
      <text:p text:style-name="P64"/>
      <text:p text:style-name="P64"><text:span text:style-name="T14"><text:s text:c="4"/>// Step 1: 選兩個 pivot（切割點）</text:span></text:p>
      <text:p text:style-name="P64"><text:span text:style-name="T14"><text:s text:c="4"/>mid1 = low <text:s/>+ (high - low) / 3;</text:span></text:p>
      <text:p text:style-name="P64"><text:span text:style-name="T14"><text:s text:c="4"/>mid2 = high - (high - low) / 3;</text:span></text:p>
      <text:p text:style-name="P64"/>
      <text:p text:style-name="P64"><text:span text:style-name="T14"><text:s text:c="4"/>// Step 2: 和兩個 pivot 比較</text:span></text:p>
      <text:p text:style-name="P64"><text:span text:style-name="T14"><text:s text:c="4"/>if (arr[mid1] == K) return mid1; <text:s text:c="2"/>// 在第一個切點</text:span></text:p>
      <text:p text:style-name="P64"><text:span text:style-name="T14"><text:s text:c="4"/>if (arr[mid2] == K) return mid2; <text:s text:c="2"/>// 在第二個切點</text:span></text:p>
      <text:p text:style-name="P64"/>
      <text:p text:style-name="P64"><text:soft-page-break/><text:span text:style-name="T14"><text:s text:c="4"/>// Step 3: 決定往哪一段遞迴</text:span></text:p>
      <text:p text:style-name="P64"><text:span text:style-name="T14"><text:s text:c="4"/>if (K &lt; arr[mid1])</text:span></text:p>
      <text:p text:style-name="P64"><text:span text:style-name="T14"><text:s text:c="8"/>return ternarySearch(arr, low, mid1-1, K); <text:s text:c="3"/>// 左段</text:span></text:p>
      <text:p text:style-name="P64"><text:span text:style-name="T14"><text:s text:c="4"/>else if (K &gt; arr[mid2])</text:span></text:p>
      <text:p text:style-name="P64"><text:span text:style-name="T14"><text:s text:c="8"/>return ternarySearch(arr, mid2+1, high, K); <text:s text:c="2"/>// 右段</text:span></text:p>
      <text:p text:style-name="P64"><text:span text:style-name="T14"><text:s text:c="4"/>else</text:span></text:p>
      <text:p text:style-name="P64"><text:span text:style-name="T14"><text:s text:c="8"/>return ternarySearch(arr, mid1+1, mid2-1, K); // 中段</text:span></text:p>
      <text:p text:style-name="P64"><text:span text:style-name="T14">}</text:span></text:p>
      <text:p text:style-name="P62"/>
      <text:p text:style-name="P60"><text:span text:style-name="T13">◆ 逐行程式碼解釋</text:span></text:p>
      <text:p text:style-name="P61"><text:span text:style-name="T43">low &gt; high</text:span><text:span text:style-name="T15">：搜尋範圍縮到空，代表找不到，回傳 -1</text:span></text:p>
      <text:p text:style-name="P61"><text:span text:style-name="T47">mid1 = low + (high-low)/3</text:span><text:span text:style-name="T15">：第一個切割點，大約在 1/3 處</text:span></text:p>
      <text:p text:style-name="P61"><text:span text:style-name="T47">mid2 = high - (high-low)/3</text:span><text:span text:style-name="T15">：第二個切割點，大約在 2/3 處</text:span></text:p>
      <text:p text:style-name="P61"><text:span text:style-name="T4">K &lt; arr[mid1]</text:span><text:span text:style-name="T15">：目標比左切點小，往左段遞迴（high 縮到 mid1-1）</text:span></text:p>
      <text:p text:style-name="P61"><text:span text:style-name="T4">K &gt; arr[mid2]</text:span><text:span text:style-name="T15">：目標比右切點大，往右段遞迴（low 放到 mid2+1）</text:span></text:p>
      <text:p text:style-name="P61"><text:span text:style-name="T4">else</text:span><text:span text:style-name="T15">：目標在中段，往中段遞迴（low=mid1+1，high=mid2-1）</text:span></text:p>
      <text:p text:style-name="P62"/>
      <text:h text:style-name="P50" text:outline-level="2"><text:span text:style-name="T1">4-4　完整手算例題（考試最重要！）</text:span></text:h>
      <text:p text:style-name="P60"><text:span text:style-name="T13">◆ 題目：在 [2, 5, 8, 11, 14, 17, 20] 中找 14</text:span></text:p>
      <text:p text:style-name="P61"><text:span text:style-name="T15">n = 7，資料已排序（方便觀察），目標 K = 14</text:span></text:p>
      <text:p text:style-name="P62"/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 table:number-columns-repeated="3"/>
        <table:table-column table:style-name="表格14.G"/>
        <table:table-header-rows>
          <table:table-row table:style-name="表格14.1">
            <table:table-cell table:style-name="表格14.A1" office:value-type="string">
              <text:p text:style-name="P58"><text:span text:style-name="T3">輪次</text:span></text:p>
            </table:table-cell>
            <table:table-cell table:style-name="表格14.A1" office:value-type="string">
              <text:p text:style-name="P58"><text:span text:style-name="T3">low</text:span></text:p>
            </table:table-cell>
            <table:table-cell table:style-name="表格14.A1" office:value-type="string">
              <text:p text:style-name="P58"><text:span text:style-name="T3">high</text:span></text:p>
            </table:table-cell>
            <table:table-cell table:style-name="表格14.A1" office:value-type="string">
              <text:p text:style-name="P58"><text:span text:style-name="T3">mid1</text:span></text:p>
            </table:table-cell>
            <table:table-cell table:style-name="表格14.A1" office:value-type="string">
              <text:p text:style-name="P58"><text:span text:style-name="T3">mid2</text:span></text:p>
            </table:table-cell>
            <table:table-cell table:style-name="表格14.A1" office:value-type="string">
              <text:p text:style-name="P58"><text:span text:style-name="T3">值(mid1/mid2)</text:span></text:p>
            </table:table-cell>
            <table:table-cell table:style-name="表格14.A1" office:value-type="string">
              <text:p text:style-name="P58"><text:span text:style-name="T3">判斷與動作</text:span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58"><text:span text:style-name="T23">輪1</text:span></text:p>
          </table:table-cell>
          <table:table-cell table:style-name="表格14.B2" office:value-type="string">
            <text:p text:style-name="P58"><text:span text:style-name="T23">0</text:span></text:p>
          </table:table-cell>
          <table:table-cell table:style-name="表格14.B2" office:value-type="string">
            <text:p text:style-name="P58"><text:span text:style-name="T23">6</text:span></text:p>
          </table:table-cell>
          <table:table-cell table:style-name="表格14.B2" office:value-type="string">
            <text:p text:style-name="P58"><text:span text:style-name="T23">0+(6-0)/3=2</text:span></text:p>
          </table:table-cell>
          <table:table-cell table:style-name="表格14.B2" office:value-type="string">
            <text:p text:style-name="P58"><text:span text:style-name="T23">6-(6-0)/3=4</text:span></text:p>
          </table:table-cell>
          <table:table-cell table:style-name="表格14.B2" office:value-type="string">
            <text:p text:style-name="P58"><text:span text:style-name="T23">arr[2]=8 / arr[4]=14</text:span></text:p>
          </table:table-cell>
          <table:table-cell table:style-name="表格14.G2" office:value-type="string">
            <text:p text:style-name="P58"><text:span text:style-name="T34">K=14 = arr[mid2]=14 → 直接找到！回傳 index 4</text:span></text:p>
          </table:table-cell>
        </table:table-row>
      </table:table>
      <text:p text:style-name="P62"/>
      <text:p text:style-name="P61"><text:span text:style-name="T15">此例只需 1 輪就找到，這就是最佳情況（Best Case）！</text:span></text:p>
      <text:p text:style-name="P62"/>
      <text:p text:style-name="P60"><text:span text:style-name="T13">◆ 題目：在 [2, 5, 8, 11, 14, 17, 20] 中找 5</text:span>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 table:number-columns-repeated="3"/>
        <table:table-column table:style-name="表格15.G"/>
        <table:table-header-rows>
          <table:table-row table:style-name="表格15.1">
            <table:table-cell table:style-name="表格15.A1" office:value-type="string">
              <text:p text:style-name="P58"><text:span text:style-name="T3">輪次</text:span></text:p>
            </table:table-cell>
            <table:table-cell table:style-name="表格15.A1" office:value-type="string">
              <text:p text:style-name="P58"><text:span text:style-name="T3">low</text:span></text:p>
            </table:table-cell>
            <table:table-cell table:style-name="表格15.A1" office:value-type="string">
              <text:p text:style-name="P58"><text:span text:style-name="T3">high</text:span></text:p>
            </table:table-cell>
            <table:table-cell table:style-name="表格15.A1" office:value-type="string">
              <text:p text:style-name="P58"><text:span text:style-name="T3">mid1</text:span></text:p>
            </table:table-cell>
            <table:table-cell table:style-name="表格15.A1" office:value-type="string">
              <text:p text:style-name="P58"><text:span text:style-name="T3">mid2</text:span></text:p>
            </table:table-cell>
            <table:table-cell table:style-name="表格15.A1" office:value-type="string">
              <text:p text:style-name="P58"><text:span text:style-name="T3">值(mid1/mid2)</text:span></text:p>
            </table:table-cell>
            <table:table-cell table:style-name="表格15.A1" office:value-type="string">
              <text:p text:style-name="P58"><text:span text:style-name="T3">判斷與動作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58"><text:span text:style-name="T23">輪1</text:span></text:p>
          </table:table-cell>
          <table:table-cell table:style-name="表格15.B2" office:value-type="string">
            <text:p text:style-name="P58"><text:span text:style-name="T23">0</text:span></text:p>
          </table:table-cell>
          <table:table-cell table:style-name="表格15.B2" office:value-type="string">
            <text:p text:style-name="P58"><text:span text:style-name="T23">6</text:span></text:p>
          </table:table-cell>
          <table:table-cell table:style-name="表格15.B2" office:value-type="string">
            <text:p text:style-name="P58"><text:span text:style-name="T23">2</text:span></text:p>
          </table:table-cell>
          <table:table-cell table:style-name="表格15.B2" office:value-type="string">
            <text:p text:style-name="P58"><text:span text:style-name="T23">4</text:span></text:p>
          </table:table-cell>
          <table:table-cell table:style-name="表格15.B2" office:value-type="string">
            <text:p text:style-name="P58"><text:span text:style-name="T23">8 / 14</text:span></text:p>
          </table:table-cell>
          <table:table-cell table:style-name="表格15.B2" office:value-type="string">
            <text:p text:style-name="P58"><text:span text:style-name="T23">K=5 &lt; arr[mid1]=8 → 往左段：high = mid1-1 = 1</text:span></text:p>
          </table:table-cell>
        </table:table-row>
        <table:table-row table:style-name="表格15.1">
          <table:table-cell table:style-name="表格15.A2" office:value-type="string">
            <text:p text:style-name="P58"><text:span text:style-name="T23">輪2</text:span></text:p>
          </table:table-cell>
          <table:table-cell table:style-name="表格15.B2" office:value-type="string">
            <text:p text:style-name="P58"><text:span text:style-name="T23">0</text:span></text:p>
          </table:table-cell>
          <table:table-cell table:style-name="表格15.B2" office:value-type="string">
            <text:p text:style-name="P58"><text:span text:style-name="T23">1</text:span></text:p>
          </table:table-cell>
          <table:table-cell table:style-name="表格15.B2" office:value-type="string">
            <text:p text:style-name="P58"><text:span text:style-name="T23">0+(1-0)/3=0</text:span></text:p>
          </table:table-cell>
          <table:table-cell table:style-name="表格15.B2" office:value-type="string">
            <text:p text:style-name="P58"><text:span text:style-name="T23">1-(1-0)/3=1</text:span></text:p>
          </table:table-cell>
          <table:table-cell table:style-name="表格15.B2" office:value-type="string">
            <text:p text:style-name="P58"><text:span text:style-name="T23">2 / 5</text:span></text:p>
          </table:table-cell>
          <table:table-cell table:style-name="表格15.G3" office:value-type="string">
            <text:p text:style-name="P58"><text:span text:style-name="T34">K=5 = arr[mid2]=5 → 找到！回傳 index 1</text:span></text:p>
          </table:table-cell>
        </table:table-row>
      </table:table>
      <text:p text:style-name="P62"/>
      <text:h text:style-name="P48" text:outline-level="2"><text:soft-page-break/><text:span text:style-name="T1">4-5　時間複雜度深入分析</text:span></text:h>
      <text:p text:style-name="P60"><text:span text:style-name="T13">◆ 遞迴公式：T(n) = T(n-2) + O(n)</text:span></text:p>
      <text:p text:style-name="P61"><text:span text:style-name="T15">這個公式描述的是「最壞情況下 Partition 型 Ternary 的遞迴成本」。</text:span></text:p>
      <text:p text:style-name="P61"><text:span text:style-name="T15">公式的兩個部分拆開來看：</text:span></text:p>
      <text:p text:style-name="P62"/>
      <table:table table:name="表格16" table:style-name="表格16">
        <table:table-column table:style-name="表格16.A"/>
        <table:table-column table:style-name="表格16.B"/>
        <table:table-header-rows>
          <table:table-row table:style-name="表格16.1">
            <table:table-cell table:style-name="表格16.A1" office:value-type="string">
              <text:p text:style-name="P58"><text:span text:style-name="T3">公式部分</text:span></text:p>
            </table:table-cell>
            <table:table-cell table:style-name="表格16.A1" office:value-type="string">
              <text:p text:style-name="P58"><text:span text:style-name="T3">意義說明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58"><text:span text:style-name="T11">T(n-2)</text:span></text:p>
          </table:table-cell>
          <table:table-cell table:style-name="表格16.B2" office:value-type="string">
            <text:p text:style-name="P58"><text:span text:style-name="T23">最壞情況下，每次 partition 只排除了 2 個元素（兩個 pivot 被確認不是目標），問題從 n 縮成 n-2，效率極低</text:span></text:p>
          </table:table-cell>
        </table:table-row>
        <table:table-row table:style-name="表格16.1">
          <table:table-cell table:style-name="表格16.A3" office:value-type="string">
            <text:p text:style-name="P58"><text:span text:style-name="T6">+ O(n)</text:span></text:p>
          </table:table-cell>
          <table:table-cell table:style-name="表格16.B2" office:value-type="string">
            <text:p text:style-name="P58"><text:span text:style-name="T23">每次 partition 必須掃描當前範圍所有 n 筆元素，這個步驟固定花 O(n)</text:span></text:p>
          </table:table-cell>
        </table:table-row>
      </table:table>
      <text:p text:style-name="P62"/>
      <text:p text:style-name="P60"><text:span text:style-name="T13">◆ 最壞情況推導（Telescoping 展開法）</text:span></text:p>
      <text:p text:style-name="P61"><text:span text:style-name="T15">把 T(n-2) 一層層展開：</text:span></text:p>
      <text:p text:style-name="P64"><text:span text:style-name="T14">T(n) <text:s text:c="2"/>= T(n-2) <text:s text:c="2"/>+ O(n)</text:span></text:p>
      <text:p text:style-name="P64"><text:span text:style-name="T14">T(n-2) = T(n-4) <text:s text:c="2"/>+ O(n-2)</text:span></text:p>
      <text:p text:style-name="P64"><text:span text:style-name="T14">T(n-4) = T(n-6) <text:s text:c="2"/>+ O(n-4)</text:span></text:p>
      <text:p text:style-name="P64"><text:span text:style-name="T14"><text:s text:c="2"/>...</text:span></text:p>
      <text:p text:style-name="P64"><text:span text:style-name="T14">T(2) <text:s text:c="2"/>= T(0) <text:s text:c="4"/>+ O(2)</text:span></text:p>
      <text:p text:style-name="P64"><text:span text:style-name="T14">T(0) <text:s text:c="2"/>= O(1) <text:s text:c="14"/>← 終止條件</text:span></text:p>
      <text:p text:style-name="P62"/>
      <text:p text:style-name="P61"><text:span text:style-name="T15">全部加起來：</text:span></text:p>
      <text:p text:style-name="P64"><text:span text:style-name="T14">T(n) = O(n) + O(n-2) + O(n-4) + ... + O(4) + O(2) + O(1)</text:span></text:p>
      <text:p text:style-name="P64"><text:span text:style-name="T14"><text:s text:c="5"/>= O(n + (n-2) + (n-4) + ... + 4 + 2)</text:span></text:p>
      <text:p text:style-name="P64"><text:span text:style-name="T14"><text:s text:c="5"/>= O( n/2 個項目，每項平均約 n/2 )</text:span></text:p>
      <text:p text:style-name="P64"><text:span text:style-name="T14"><text:s text:c="5"/>= O( n/2 × n/2 ) = O(n²/4) = O(n²)</text:span></text:p>
      <text:p text:style-name="P62"/>
      <text:p text:style-name="P65"><text:span text:style-name="T43">⚠ </text:span><text:span text:style-name="T45">結論：最壞情況 Worst = O(n²)。這比 Linear Search 的 O(n) 還慢！</text:span></text:p>
      <text:p text:style-name="P62"/>
      <text:p text:style-name="P60"><text:span text:style-name="T13">◆ 為什麼最壞只排除了 2 個元素？</text:span></text:p>
      <text:p text:style-name="P61"><text:span text:style-name="T15">想像一個極端情況：</text:span></text:p>
      <text:p text:style-name="P61"><text:span text:style-name="T11">資料：</text:span><text:span text:style-name="T15">[1, 2, 3, 4, 5, 6, 7, 8, ...]，目標 K = 8（藏在最後）</text:span></text:p>
      <text:list text:continue-list="list3201917082" text:style-name="WWNum2">
        <text:list-item>
          <text:p text:style-name="P52"><text:span text:style-name="T15">第1輪：選 mid1=1 和 mid2=3（皆不等於 8）→ 確認 K &gt; arr[mid2]=3 → 排除左段和mid，剩 [5,6,7,8,...]</text:span></text:p>
        </text:list-item>
        <text:list-item>
          <text:p text:style-name="P52"><text:span text:style-name="T15">但如果 pivot 選得極差（例如每次都選到靠近邊緣的位置）→ 每次只排除 2 個 pivot → 效率等同 O(n²)</text:span></text:p>
        </text:list-item>
      </text:list>
      <text:p text:style-name="P62"/>
      <text:p text:style-name="P65"><text:span text:style-name="T43">⚠ </text:span><text:span text:style-name="T45">這就是 Worst case 的本質：pivot 選到「邊角」，每次只砍掉 2 個元素，剩下 n-2 個再來一輪。</text:span></text:p>
      <text:p text:style-name="P62"/>
      <text:p text:style-name="P60"><text:soft-page-break/><text:span text:style-name="T13">◆ 最佳情況 Best = O(n)</text:span></text:p>
      <text:p text:style-name="P61"><text:span text:style-name="T15">最佳情況：每次 partition 都均勻地把資料切成三等分，每輪排除 2/3：</text:span></text:p>
      <text:p text:style-name="P64"><text:span text:style-name="T14">T(n) = T(n/3) + O(n)</text:span></text:p>
      <text:p text:style-name="P64"><text:span text:style-name="T14"><text:s text:c="5"/>= O(n) + O(n/3) + O(n/9) + ...</text:span></text:p>
      <text:p text:style-name="P64"><text:span text:style-name="T14"><text:s text:c="5"/>= O(n × (1 + 1/3 + 1/9 + ...))</text:span></text:p>
      <text:p text:style-name="P64"><text:span text:style-name="T14"><text:s text:c="5"/>= O(n × 3/2) <text:s/>（等比級數收斂）</text:span></text:p>
      <text:p text:style-name="P64"><text:span text:style-name="T14"><text:s text:c="5"/>= O(n)</text:span></text:p>
      <text:p text:style-name="P61"><text:span text:style-name="T15">即使在最佳情況下，仍至少需要 O(n) 一輪掃描，不可能比 O(n) 更快。</text:span></text:p>
      <text:p text:style-name="P62"/>
      <text:h text:style-name="P49" text:outline-level="2"><text:span text:style-name="T1">4-6　Best / Worst 完整對照</text:span></text:h>
      <table:table table:name="表格17" table:style-name="表格17">
        <table:table-column table:style-name="表格17.A" table:number-columns-repeated="3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58"><text:span text:style-name="T3">情況</text:span></text:p>
            </table:table-cell>
            <table:table-cell table:style-name="表格17.A1" office:value-type="string">
              <text:p text:style-name="P58"><text:span text:style-name="T3">每次排除多少？</text:span></text:p>
            </table:table-cell>
            <table:table-cell table:style-name="表格17.A1" office:value-type="string">
              <text:p text:style-name="P58"><text:span text:style-name="T3">遞迴式</text:span></text:p>
            </table:table-cell>
            <table:table-cell table:style-name="表格17.A1" office:value-type="string">
              <text:p text:style-name="P58"><text:span text:style-name="T3">總複雜度</text:span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58"><text:span text:style-name="T34">Best（最佳）</text:span></text:p>
          </table:table-cell>
          <table:table-cell table:style-name="表格17.B2" office:value-type="string">
            <text:p text:style-name="P58"><text:span text:style-name="T23">每次排除 2/3 資料</text:span></text:p>
          </table:table-cell>
          <table:table-cell table:style-name="表格17.B2" office:value-type="string">
            <text:p text:style-name="P58"><text:span text:style-name="T23">T(n) = T(n/3) + O(n)</text:span></text:p>
          </table:table-cell>
          <table:table-cell table:style-name="表格17.A2" office:value-type="string">
            <text:p text:style-name="P58"><text:span text:style-name="T34">O(n)</text:span></text:p>
          </table:table-cell>
        </table:table-row>
        <table:table-row table:style-name="表格17.1">
          <table:table-cell table:style-name="表格17.A3" office:value-type="string">
            <text:p text:style-name="P58"><text:span text:style-name="T43">Worst（最壞）</text:span></text:p>
          </table:table-cell>
          <table:table-cell table:style-name="表格17.B2" office:value-type="string">
            <text:p text:style-name="P58"><text:span text:style-name="T23">每次只排除 2 個元素</text:span></text:p>
          </table:table-cell>
          <table:table-cell table:style-name="表格17.B2" office:value-type="string">
            <text:p text:style-name="P58"><text:span text:style-name="T23">T(n) = T(n-2) + O(n)</text:span></text:p>
          </table:table-cell>
          <table:table-cell table:style-name="表格17.A3" office:value-type="string">
            <text:p text:style-name="P58"><text:span text:style-name="T43">O(n²)</text:span></text:p>
          </table:table-cell>
        </table:table-row>
      </table:table>
      <text:p text:style-name="P62"/>
      <text:p text:style-name="P63"><text:span text:style-name="T6">【考試口訣】 </text:span><text:span text:style-name="T15">Ternary Search：未排序 + partition，最壞 T(n)=T(n-2)+O(n)=O(n²)，最佳 O(n)</text:span></text:p>
      <text:p text:style-name="P62"/>
      <text:h text:style-name="P48" text:outline-level="2"><text:span text:style-name="T1">4-7　與 Binary Search 完整比較</text:span></text:h>
      <table:table table:name="表格18" table:style-name="表格18">
        <table:table-column table:style-name="表格18.A"/>
        <table:table-column table:style-name="表格18.B" table:number-columns-repeated="2"/>
        <table:table-header-rows>
          <table:table-row table:style-name="表格18.1">
            <table:table-cell table:style-name="表格18.A1" office:value-type="string">
              <text:p text:style-name="P58"><text:span text:style-name="T3">比較項目</text:span></text:p>
            </table:table-cell>
            <table:table-cell table:style-name="表格18.A1" office:value-type="string">
              <text:p text:style-name="P58"><text:span text:style-name="T3">Binary Search</text:span></text:p>
            </table:table-cell>
            <table:table-cell table:style-name="表格18.A1" office:value-type="string">
              <text:p text:style-name="P58"><text:span text:style-name="T3">Ternary Search（partition型）</text:span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58"><text:span text:style-name="T23">資料前提</text:span></text:p>
          </table:table-cell>
          <table:table-cell table:style-name="表格18.A2" office:value-type="string">
            <text:p text:style-name="P58"><text:span text:style-name="T23">必須已排序</text:span></text:p>
          </table:table-cell>
          <table:table-cell table:style-name="表格18.A2" office:value-type="string">
            <text:p text:style-name="P58"><text:span text:style-name="T23">不需排序</text:span></text:p>
          </table:table-cell>
        </table:table-row>
        <table:table-row table:style-name="表格18.1">
          <table:table-cell table:style-name="表格18.A2" office:value-type="string">
            <text:p text:style-name="P58"><text:span text:style-name="T23">切割段數</text:span></text:p>
          </table:table-cell>
          <table:table-cell table:style-name="表格18.A2" office:value-type="string">
            <text:p text:style-name="P58"><text:span text:style-name="T23">2 段（1個 pivot：mid）</text:span></text:p>
          </table:table-cell>
          <table:table-cell table:style-name="表格18.A2" office:value-type="string">
            <text:p text:style-name="P58"><text:span text:style-name="T23">3 段（2個 pivot：mid1, mid2）</text:span></text:p>
          </table:table-cell>
        </table:table-row>
        <table:table-row table:style-name="表格18.1">
          <table:table-cell table:style-name="表格18.A2" office:value-type="string">
            <text:p text:style-name="P58"><text:span text:style-name="T23">每次比較次數</text:span></text:p>
          </table:table-cell>
          <table:table-cell table:style-name="表格18.A2" office:value-type="string">
            <text:p text:style-name="P58"><text:span text:style-name="T23">1 次（只看 mid）</text:span></text:p>
          </table:table-cell>
          <table:table-cell table:style-name="表格18.A2" office:value-type="string">
            <text:p text:style-name="P58"><text:span text:style-name="T23">最多 2 次（看 mid1 和 mid2）</text:span></text:p>
          </table:table-cell>
        </table:table-row>
        <table:table-row table:style-name="表格18.1">
          <table:table-cell table:style-name="表格18.A2" office:value-type="string">
            <text:p text:style-name="P58"><text:span text:style-name="T23">排除比例（理想）</text:span></text:p>
          </table:table-cell>
          <table:table-cell table:style-name="表格18.A2" office:value-type="string">
            <text:p text:style-name="P58"><text:span text:style-name="T23">排除 1/2</text:span></text:p>
          </table:table-cell>
          <table:table-cell table:style-name="表格18.A2" office:value-type="string">
            <text:p text:style-name="P58"><text:span text:style-name="T23">排除 2/3（理想）</text:span></text:p>
          </table:table-cell>
        </table:table-row>
        <table:table-row table:style-name="表格18.1">
          <table:table-cell table:style-name="表格18.A2" office:value-type="string">
            <text:p text:style-name="P58"><text:span text:style-name="T23">最壞複雜度</text:span></text:p>
          </table:table-cell>
          <table:table-cell table:style-name="表格18.B6" office:value-type="string">
            <text:p text:style-name="P58"><text:span text:style-name="T34">O(log n)</text:span></text:p>
          </table:table-cell>
          <table:table-cell table:style-name="表格18.C6" office:value-type="string">
            <text:p text:style-name="P58"><text:span text:style-name="T43">O(n²)</text:span></text:p>
          </table:table-cell>
        </table:table-row>
        <table:table-row table:style-name="表格18.1">
          <table:table-cell table:style-name="表格18.A2" office:value-type="string">
            <text:p text:style-name="P58"><text:span text:style-name="T23">最佳複雜度</text:span></text:p>
          </table:table-cell>
          <table:table-cell table:style-name="表格18.A2" office:value-type="string">
            <text:p text:style-name="P58"><text:span text:style-name="T23">O(1)</text:span></text:p>
          </table:table-cell>
          <table:table-cell table:style-name="表格18.A2" office:value-type="string">
            <text:p text:style-name="P58"><text:span text:style-name="T23">O(n)</text:span></text:p>
          </table:table-cell>
        </table:table-row>
        <table:table-row table:style-name="表格18.1">
          <table:table-cell table:style-name="表格18.A2" office:value-type="string">
            <text:p text:style-name="P58"><text:span text:style-name="T23">實用性</text:span></text:p>
          </table:table-cell>
          <table:table-cell table:style-name="表格18.A2" office:value-type="string">
            <text:p text:style-name="P58"><text:span text:style-name="T23">★★★★★ 非常實用</text:span></text:p>
          </table:table-cell>
          <table:table-cell table:style-name="表格18.A2" office:value-type="string">
            <text:p text:style-name="P58"><text:span text:style-name="T23">★★☆☆☆ 較少實用（最壞退化嚴重）</text:span></text:p>
          </table:table-cell>
        </table:table-row>
      </table:table>
      <text:p text:style-name="P62"/>
      <text:p text:style-name="P65"><text:span text:style-name="T43">⚠ </text:span><text:span text:style-name="T45">Ternary 雖然「切更多段、排除更多」聽起來更快，但因為最壞情況極差（O(n²) vs O(log n)），實際上不如 Binary Search。</text:span></text:p>
      <text:p text:style-name="P62"/>
      <text:p text:style-name="P60"/>
      <text:h text:style-name="P17" text:outline-level="1">第五章　字串比對（Pattern Matching）</text:h>
      <text:p text:style-name="P5"/>
      <text:p text:style-name="P32">◆ 題目設定</text:p>
      <text:p text:style-name="P6"><text:span text:style-name="T11">Text X = </text:span><text:span text:style-name="T49">"AGTCATTCGATTC"</text:span><text:span text:style-name="T15">（長度 13）</text:span></text:p>
      <text:p text:style-name="P6"><text:span text:style-name="T11">Pattern Y = </text:span><text:span text:style-name="T10">"ATTC"</text:span><text:span text:style-name="T15">（長度 4）</text:span></text:p>
      <text:p text:style-name="P20">問題：用「前向法」和「後向法」比對，各需比較幾次字元？</text:p>
      <text:p text:style-name="P5"/>
      <text:p text:style-name="P32">◆ 字元索引對照表</text:p>
      <table:table table:name="表格6" table:style-name="表格6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row table:style-name="表格6.1">
          <table:table-cell table:style-name="表格6.A1" office:value-type="string">
            <text:p text:style-name="P19">idx</text:p>
          </table:table-cell>
          <table:table-cell table:style-name="表格6.B1" office:value-type="string">
            <text:p text:style-name="P19">0</text:p>
          </table:table-cell>
          <table:table-cell table:style-name="表格6.B1" office:value-type="string">
            <text:p text:style-name="P19">1</text:p>
          </table:table-cell>
          <table:table-cell table:style-name="表格6.B1" office:value-type="string">
            <text:p text:style-name="P19">2</text:p>
          </table:table-cell>
          <table:table-cell table:style-name="表格6.B1" office:value-type="string">
            <text:p text:style-name="P19">3</text:p>
          </table:table-cell>
          <table:table-cell table:style-name="表格6.B1" office:value-type="string">
            <text:p text:style-name="P19">4</text:p>
          </table:table-cell>
          <table:table-cell table:style-name="表格6.B1" office:value-type="string">
            <text:p text:style-name="P19">5</text:p>
          </table:table-cell>
          <table:table-cell table:style-name="表格6.B1" office:value-type="string">
            <text:p text:style-name="P19">6</text:p>
          </table:table-cell>
          <table:table-cell table:style-name="表格6.B1" office:value-type="string">
            <text:p text:style-name="P19">7</text:p>
          </table:table-cell>
          <table:table-cell table:style-name="表格6.B1" office:value-type="string">
            <text:p text:style-name="P19">8</text:p>
          </table:table-cell>
          <table:table-cell table:style-name="表格6.B1" office:value-type="string">
            <text:p text:style-name="P19">9</text:p>
          </table:table-cell>
          <table:table-cell table:style-name="表格6.B1" office:value-type="string">
            <text:p text:style-name="P19">10</text:p>
          </table:table-cell>
          <table:table-cell table:style-name="表格6.B1" office:value-type="string">
            <text:p text:style-name="P19">11</text:p>
          </table:table-cell>
          <table:table-cell table:style-name="表格6.B1" office:value-type="string">
            <text:p text:style-name="P19">12</text:p>
          </table:table-cell>
        </table:table-row>
        <table:table-row table:style-name="表格6.1">
          <table:table-cell table:style-name="表格6.A2" office:value-type="string">
            <text:p text:style-name="P23">字元</text:p>
          </table:table-cell>
          <table:table-cell table:style-name="表格6.B2" office:value-type="string">
            <text:p text:style-name="P35">A</text:p>
          </table:table-cell>
          <table:table-cell table:style-name="表格6.C2" office:value-type="string">
            <text:p text:style-name="P28">G</text:p>
          </table:table-cell>
          <table:table-cell table:style-name="表格6.C2" office:value-type="string">
            <text:p text:style-name="P35">T</text:p>
          </table:table-cell>
          <table:table-cell table:style-name="表格6.E2" office:value-type="string">
            <text:p text:style-name="P35">C</text:p>
          </table:table-cell>
          <table:table-cell table:style-name="表格6.B2" office:value-type="string">
            <text:p text:style-name="P35">A</text:p>
          </table:table-cell>
          <table:table-cell table:style-name="表格6.C2" office:value-type="string">
            <text:p text:style-name="P35">T</text:p>
          </table:table-cell>
          <table:table-cell table:style-name="表格6.C2" office:value-type="string">
            <text:p text:style-name="P35">T</text:p>
          </table:table-cell>
          <table:table-cell table:style-name="表格6.E2" office:value-type="string">
            <text:p text:style-name="P35">C</text:p>
          </table:table-cell>
          <table:table-cell table:style-name="表格6.C2" office:value-type="string">
            <text:p text:style-name="P28">G</text:p>
          </table:table-cell>
          <table:table-cell table:style-name="表格6.B2" office:value-type="string">
            <text:p text:style-name="P35">A</text:p>
          </table:table-cell>
          <table:table-cell table:style-name="表格6.C2" office:value-type="string">
            <text:p text:style-name="P35">T</text:p>
          </table:table-cell>
          <table:table-cell table:style-name="表格6.C2" office:value-type="string">
            <text:p text:style-name="P35">T</text:p>
          </table:table-cell>
          <table:table-cell table:style-name="表格6.E2" office:value-type="string">
            <text:p text:style-name="P35">C</text:p>
          </table:table-cell>
        </table:table-row>
      </table:table>
      <text:p text:style-name="P5"/>
      <text:h text:style-name="P13" text:outline-level="2">5-1　前向法（Forward）：從 pattern 左端往右比對</text:h>
      <text:p text:style-name="P20">每次把 pattern 對齊 text 的某個位置（pos），從 pattern[0] 開始，由左到右逐字比對。</text:p>
      <text:p text:style-name="P5"/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header-rows>
          <table:table-row table:style-name="表格7.1">
            <table:table-cell table:style-name="表格7.A1" office:value-type="string">
              <text:p text:style-name="P19">pos</text:p>
            </table:table-cell>
            <table:table-cell table:style-name="表格7.A1" office:value-type="string">
              <text:p text:style-name="P19">對齊文字（4字元）</text:p>
            </table:table-cell>
            <table:table-cell table:style-name="表格7.A1" office:value-type="string">
              <text:p text:style-name="P19">比對過程</text:p>
            </table:table-cell>
            <table:table-cell table:style-name="表格7.A1" office:value-type="string">
              <text:p text:style-name="P19">比較次數</text:p>
            </table:table-cell>
            <table:table-cell table:style-name="表格7.A1" office:value-type="string">
              <text:p text:style-name="P19">結果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3">0</text:p>
          </table:table-cell>
          <table:table-cell table:style-name="表格7.A2" office:value-type="string">
            <text:p text:style-name="P23">AGTC</text:p>
          </table:table-cell>
          <table:table-cell table:style-name="表格7.A2" office:value-type="string">
            <text:p text:style-name="P23">A=A✓ → G≠T✗ 停止</text:p>
          </table:table-cell>
          <table:table-cell table:style-name="表格7.D2" office:value-type="string">
            <text:p text:style-name="P31">2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GTCA</text:p>
          </table:table-cell>
          <table:table-cell table:style-name="表格7.A2" office:value-type="string">
            <text:p text:style-name="P23">G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2" office:value-type="string">
            <text:p text:style-name="P23">2</text:p>
          </table:table-cell>
          <table:table-cell table:style-name="表格7.A2" office:value-type="string">
            <text:p text:style-name="P23">TCAT</text:p>
          </table:table-cell>
          <table:table-cell table:style-name="表格7.A2" office:value-type="string">
            <text:p text:style-name="P23">T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2" office:value-type="string">
            <text:p text:style-name="P23">3</text:p>
          </table:table-cell>
          <table:table-cell table:style-name="表格7.A2" office:value-type="string">
            <text:p text:style-name="P23">CATT</text:p>
          </table:table-cell>
          <table:table-cell table:style-name="表格7.A2" office:value-type="string">
            <text:p text:style-name="P23">C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6" office:value-type="string">
            <text:p text:style-name="P23">4</text:p>
          </table:table-cell>
          <table:table-cell table:style-name="表格7.A6" office:value-type="string">
            <text:p text:style-name="P23">ATTC</text:p>
          </table:table-cell>
          <table:table-cell table:style-name="表格7.A6" office:value-type="string">
            <text:p text:style-name="P23">A=A✓ T=T✓ T=T✓ C=C✓ 全符合！</text:p>
          </table:table-cell>
          <table:table-cell table:style-name="表格7.A6" office:value-type="string">
            <text:p text:style-name="P39">4</text:p>
          </table:table-cell>
          <table:table-cell table:style-name="表格7.A6" office:value-type="string">
            <text:p text:style-name="P23">✅ 找到</text:p>
          </table:table-cell>
        </table:table-row>
        <table:table-row table:style-name="表格7.1">
          <table:table-cell table:style-name="表格7.A2" office:value-type="string">
            <text:p text:style-name="P23">5</text:p>
          </table:table-cell>
          <table:table-cell table:style-name="表格7.A2" office:value-type="string">
            <text:p text:style-name="P23">TTCG</text:p>
          </table:table-cell>
          <table:table-cell table:style-name="表格7.A2" office:value-type="string">
            <text:p text:style-name="P23">T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2" office:value-type="string">
            <text:p text:style-name="P23">6</text:p>
          </table:table-cell>
          <table:table-cell table:style-name="表格7.A2" office:value-type="string">
            <text:p text:style-name="P23">TCGA</text:p>
          </table:table-cell>
          <table:table-cell table:style-name="表格7.A2" office:value-type="string">
            <text:p text:style-name="P23">T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2" office:value-type="string">
            <text:p text:style-name="P23">7</text:p>
          </table:table-cell>
          <table:table-cell table:style-name="表格7.A2" office:value-type="string">
            <text:p text:style-name="P23">CGAT</text:p>
          </table:table-cell>
          <table:table-cell table:style-name="表格7.A2" office:value-type="string">
            <text:p text:style-name="P23">C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2" office:value-type="string">
            <text:p text:style-name="P23">8</text:p>
          </table:table-cell>
          <table:table-cell table:style-name="表格7.A2" office:value-type="string">
            <text:p text:style-name="P23">GATT</text:p>
          </table:table-cell>
          <table:table-cell table:style-name="表格7.A2" office:value-type="string">
            <text:p text:style-name="P23">G≠A✗ 停止</text:p>
          </table:table-cell>
          <table:table-cell table:style-name="表格7.A2" office:value-type="string">
            <text:p text:style-name="P23">1</text:p>
          </table:table-cell>
          <table:table-cell table:style-name="表格7.A2" office:value-type="string">
            <text:p text:style-name="P23">失敗</text:p>
          </table:table-cell>
        </table:table-row>
        <table:table-row table:style-name="表格7.1">
          <table:table-cell table:style-name="表格7.A6" office:value-type="string">
            <text:p text:style-name="P23">9</text:p>
          </table:table-cell>
          <table:table-cell table:style-name="表格7.A6" office:value-type="string">
            <text:p text:style-name="P23">ATTC</text:p>
          </table:table-cell>
          <table:table-cell table:style-name="表格7.A6" office:value-type="string">
            <text:p text:style-name="P23">A=A✓ T=T✓ T=T✓ C=C✓ 全符合！</text:p>
          </table:table-cell>
          <table:table-cell table:style-name="表格7.A6" office:value-type="string">
            <text:p text:style-name="P39">4</text:p>
          </table:table-cell>
          <table:table-cell table:style-name="表格7.A6" office:value-type="string">
            <text:p text:style-name="P23">✅ 找到</text:p>
          </table:table-cell>
        </table:table-row>
        <table:table-row table:style-name="表格7.1">
          <table:table-cell table:style-name="表格7.A2" office:value-type="string">
            <text:p text:style-name="P23">10</text:p>
          </table:table-cell>
          <table:table-cell table:style-name="表格7.A2" office:value-type="string">
            <text:p text:style-name="P23">TTC（不足）</text:p>
          </table:table-cell>
          <table:table-cell table:style-name="表格7.A2" office:value-type="string">
            <text:p text:style-name="P23">pattern 放不下，自動跳過</text:p>
          </table:table-cell>
          <table:table-cell table:style-name="表格7.D12" office:value-type="string">
            <text:p text:style-name="P28">0</text:p>
          </table:table-cell>
          <table:table-cell table:style-name="表格7.A2" office:value-type="string">
            <text:p text:style-name="P23">跳過</text:p>
          </table:table-cell>
        </table:table-row>
        <table:table-row table:style-name="表格7.1">
          <table:table-cell table:style-name="表格7.A2" office:value-type="string">
            <text:p text:style-name="P23">11</text:p>
          </table:table-cell>
          <table:table-cell table:style-name="表格7.A2" office:value-type="string">
            <text:p text:style-name="P23">TC（不足）</text:p>
          </table:table-cell>
          <table:table-cell table:style-name="表格7.A2" office:value-type="string">
            <text:p text:style-name="P23">pattern 放不下，自動跳過</text:p>
          </table:table-cell>
          <table:table-cell table:style-name="表格7.D12" office:value-type="string">
            <text:p text:style-name="P28">0</text:p>
          </table:table-cell>
          <table:table-cell table:style-name="表格7.A2" office:value-type="string">
            <text:p text:style-name="P23">跳過</text:p>
          </table:table-cell>
        </table:table-row>
        <table:table-row table:style-name="表格7.1">
          <table:table-cell table:style-name="表格7.A2" office:value-type="string">
            <text:p text:style-name="P23">12</text:p>
          </table:table-cell>
          <table:table-cell table:style-name="表格7.A2" office:value-type="string">
            <text:p text:style-name="P23">C（不足）</text:p>
          </table:table-cell>
          <table:table-cell table:style-name="表格7.A2" office:value-type="string">
            <text:p text:style-name="P23">pattern 放不下，自動跳過</text:p>
          </table:table-cell>
          <table:table-cell table:style-name="表格7.D12" office:value-type="string">
            <text:p text:style-name="P28">0</text:p>
          </table:table-cell>
          <table:table-cell table:style-name="表格7.A2" office:value-type="string">
            <text:p text:style-name="P23">跳過</text:p>
          </table:table-cell>
        </table:table-row>
        <text:soft-page-break/>
        <table:table-row table:style-name="表格7.1">
          <table:table-cell table:style-name="表格7.A15" office:value-type="string">
            <text:p text:style-name="P19">合計</text:p>
          </table:table-cell>
          <table:table-cell table:style-name="表格7.A15" office:value-type="string">
            <text:p text:style-name="P2"/>
          </table:table-cell>
          <table:table-cell table:style-name="表格7.A15" office:value-type="string">
            <text:p text:style-name="P19">2+1+1+1+4+1+1+1+1+4+0+0+0</text:p>
          </table:table-cell>
          <table:table-cell table:style-name="表格7.D15" office:value-type="string">
            <text:p text:style-name="P19">17 次</text:p>
          </table:table-cell>
          <table:table-cell table:style-name="表格7.A15" office:value-type="string">
            <text:p text:style-name="P2"/>
          </table:table-cell>
        </table:table-row>
      </table:table>
      <text:p text:style-name="P5"/>
      <text:h text:style-name="P14" text:outline-level="2">5-2　後向法（Backward）：從 pattern 右端往左比對</text:h>
      <text:p text:style-name="P20">每次把 pattern 對齊同一個位置，但改從 pattern[3]（最後一個字）開始比，由右往左。</text:p>
      <text:p text:style-name="P20">目的：若最後一個字就不符合，可以更快跳出，有時能節省比較次數。</text:p>
      <text:p text:style-name="P5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header-rows>
          <table:table-row table:style-name="表格8.1">
            <table:table-cell table:style-name="表格8.A1" office:value-type="string">
              <text:p text:style-name="P19">pos</text:p>
            </table:table-cell>
            <table:table-cell table:style-name="表格8.A1" office:value-type="string">
              <text:p text:style-name="P19">對齊文字（4字元）</text:p>
            </table:table-cell>
            <table:table-cell table:style-name="表格8.A1" office:value-type="string">
              <text:p text:style-name="P19">比對過程（從右往左）</text:p>
            </table:table-cell>
            <table:table-cell table:style-name="表格8.A1" office:value-type="string">
              <text:p text:style-name="P19">比較次數</text:p>
            </table:table-cell>
            <table:table-cell table:style-name="表格8.A1" office:value-type="string">
              <text:p text:style-name="P19">結果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3">0</text:p>
          </table:table-cell>
          <table:table-cell table:style-name="表格8.A2" office:value-type="string">
            <text:p text:style-name="P23">AGTC</text:p>
          </table:table-cell>
          <table:table-cell table:style-name="表格8.A2" office:value-type="string">
            <text:p text:style-name="P23">C=C✓ → T=T✓ → G≠T✗ 停止</text:p>
          </table:table-cell>
          <table:table-cell table:style-name="表格8.D2" office:value-type="string">
            <text:p text:style-name="P31">3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GTCA</text:p>
          </table:table-cell>
          <table:table-cell table:style-name="表格8.A2" office:value-type="string">
            <text:p text:style-name="P23">A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2" office:value-type="string">
            <text:p text:style-name="P23">2</text:p>
          </table:table-cell>
          <table:table-cell table:style-name="表格8.A2" office:value-type="string">
            <text:p text:style-name="P23">TCAT</text:p>
          </table:table-cell>
          <table:table-cell table:style-name="表格8.A2" office:value-type="string">
            <text:p text:style-name="P23">T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2" office:value-type="string">
            <text:p text:style-name="P23">3</text:p>
          </table:table-cell>
          <table:table-cell table:style-name="表格8.A2" office:value-type="string">
            <text:p text:style-name="P23">CATT</text:p>
          </table:table-cell>
          <table:table-cell table:style-name="表格8.A2" office:value-type="string">
            <text:p text:style-name="P23">T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6" office:value-type="string">
            <text:p text:style-name="P23">4</text:p>
          </table:table-cell>
          <table:table-cell table:style-name="表格8.A6" office:value-type="string">
            <text:p text:style-name="P23">ATTC</text:p>
          </table:table-cell>
          <table:table-cell table:style-name="表格8.A6" office:value-type="string">
            <text:p text:style-name="P23">C=C✓ T=T✓ T=T✓ A=A✓ 全符合！</text:p>
          </table:table-cell>
          <table:table-cell table:style-name="表格8.A6" office:value-type="string">
            <text:p text:style-name="P39">4</text:p>
          </table:table-cell>
          <table:table-cell table:style-name="表格8.A6" office:value-type="string">
            <text:p text:style-name="P23">✅ 找到</text:p>
          </table:table-cell>
        </table:table-row>
        <table:table-row table:style-name="表格8.1">
          <table:table-cell table:style-name="表格8.A2" office:value-type="string">
            <text:p text:style-name="P23">5</text:p>
          </table:table-cell>
          <table:table-cell table:style-name="表格8.A2" office:value-type="string">
            <text:p text:style-name="P23">TTCG</text:p>
          </table:table-cell>
          <table:table-cell table:style-name="表格8.A2" office:value-type="string">
            <text:p text:style-name="P23">G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2" office:value-type="string">
            <text:p text:style-name="P23">6</text:p>
          </table:table-cell>
          <table:table-cell table:style-name="表格8.A2" office:value-type="string">
            <text:p text:style-name="P23">TCGA</text:p>
          </table:table-cell>
          <table:table-cell table:style-name="表格8.A2" office:value-type="string">
            <text:p text:style-name="P23">A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2" office:value-type="string">
            <text:p text:style-name="P23">7</text:p>
          </table:table-cell>
          <table:table-cell table:style-name="表格8.A2" office:value-type="string">
            <text:p text:style-name="P23">CGAT</text:p>
          </table:table-cell>
          <table:table-cell table:style-name="表格8.A2" office:value-type="string">
            <text:p text:style-name="P23">T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2" office:value-type="string">
            <text:p text:style-name="P23">8</text:p>
          </table:table-cell>
          <table:table-cell table:style-name="表格8.A2" office:value-type="string">
            <text:p text:style-name="P23">GATT</text:p>
          </table:table-cell>
          <table:table-cell table:style-name="表格8.A2" office:value-type="string">
            <text:p text:style-name="P23">T≠C✗ 停止</text:p>
          </table:table-cell>
          <table:table-cell table:style-name="表格8.A2" office:value-type="string">
            <text:p text:style-name="P23">1</text:p>
          </table:table-cell>
          <table:table-cell table:style-name="表格8.A2" office:value-type="string">
            <text:p text:style-name="P23">失敗</text:p>
          </table:table-cell>
        </table:table-row>
        <table:table-row table:style-name="表格8.1">
          <table:table-cell table:style-name="表格8.A6" office:value-type="string">
            <text:p text:style-name="P23">9</text:p>
          </table:table-cell>
          <table:table-cell table:style-name="表格8.A6" office:value-type="string">
            <text:p text:style-name="P23">ATTC</text:p>
          </table:table-cell>
          <table:table-cell table:style-name="表格8.A6" office:value-type="string">
            <text:p text:style-name="P23">C=C✓ T=T✓ T=T✓ A=A✓ 全符合！</text:p>
          </table:table-cell>
          <table:table-cell table:style-name="表格8.A6" office:value-type="string">
            <text:p text:style-name="P39">4</text:p>
          </table:table-cell>
          <table:table-cell table:style-name="表格8.A6" office:value-type="string">
            <text:p text:style-name="P23">✅ 找到</text:p>
          </table:table-cell>
        </table:table-row>
        <table:table-row table:style-name="表格8.1">
          <table:table-cell table:style-name="表格8.A2" office:value-type="string">
            <text:p text:style-name="P23">10</text:p>
          </table:table-cell>
          <table:table-cell table:style-name="表格8.A2" office:value-type="string">
            <text:p text:style-name="P23">TTC（不足）</text:p>
          </table:table-cell>
          <table:table-cell table:style-name="表格8.A2" office:value-type="string">
            <text:p text:style-name="P23">pattern 放不下，自動跳過</text:p>
          </table:table-cell>
          <table:table-cell table:style-name="表格8.D12" office:value-type="string">
            <text:p text:style-name="P28">0</text:p>
          </table:table-cell>
          <table:table-cell table:style-name="表格8.A2" office:value-type="string">
            <text:p text:style-name="P23">跳過</text:p>
          </table:table-cell>
        </table:table-row>
        <table:table-row table:style-name="表格8.1">
          <table:table-cell table:style-name="表格8.A2" office:value-type="string">
            <text:p text:style-name="P23">11</text:p>
          </table:table-cell>
          <table:table-cell table:style-name="表格8.A2" office:value-type="string">
            <text:p text:style-name="P23">TC（不足）</text:p>
          </table:table-cell>
          <table:table-cell table:style-name="表格8.A2" office:value-type="string">
            <text:p text:style-name="P23">pattern 放不下，自動跳過</text:p>
          </table:table-cell>
          <table:table-cell table:style-name="表格8.D12" office:value-type="string">
            <text:p text:style-name="P28">0</text:p>
          </table:table-cell>
          <table:table-cell table:style-name="表格8.A2" office:value-type="string">
            <text:p text:style-name="P23">跳過</text:p>
          </table:table-cell>
        </table:table-row>
        <table:table-row table:style-name="表格8.1">
          <table:table-cell table:style-name="表格8.A2" office:value-type="string">
            <text:p text:style-name="P23">12</text:p>
          </table:table-cell>
          <table:table-cell table:style-name="表格8.A2" office:value-type="string">
            <text:p text:style-name="P23">C（不足）</text:p>
          </table:table-cell>
          <table:table-cell table:style-name="表格8.A2" office:value-type="string">
            <text:p text:style-name="P23">pattern 放不下，自動跳過</text:p>
          </table:table-cell>
          <table:table-cell table:style-name="表格8.D12" office:value-type="string">
            <text:p text:style-name="P28">0</text:p>
          </table:table-cell>
          <table:table-cell table:style-name="表格8.A2" office:value-type="string">
            <text:p text:style-name="P23">跳過</text:p>
          </table:table-cell>
        </table:table-row>
        <table:table-row table:style-name="表格8.1">
          <table:table-cell table:style-name="表格8.A1" office:value-type="string">
            <text:p text:style-name="P19">合計</text:p>
          </table:table-cell>
          <table:table-cell table:style-name="表格8.A1" office:value-type="string">
            <text:p text:style-name="P2"/>
          </table:table-cell>
          <table:table-cell table:style-name="表格8.A1" office:value-type="string">
            <text:p text:style-name="P19">3+1+1+1+4+1+1+1+1+4+0+0+0</text:p>
          </table:table-cell>
          <table:table-cell table:style-name="表格8.A1" office:value-type="string">
            <text:p text:style-name="P19">18 次</text:p>
          </table:table-cell>
          <table:table-cell table:style-name="表格8.A1" office:value-type="string">
            <text:p text:style-name="P2"/>
          </table:table-cell>
        </table:table-row>
      </table:table>
      <text:p text:style-name="P5"/>
      <text:p text:style-name="P32">◆ 前向 vs 後向比較</text:p>
      <table:table table:name="表格9" table:style-name="表格9">
        <table:table-column table:style-name="表格9.A" table:number-columns-repeated="3"/>
        <table:table-header-rows>
          <table:table-row table:style-name="表格9.1">
            <table:table-cell table:style-name="表格9.A1" office:value-type="string">
              <text:p text:style-name="P19">方法</text:p>
            </table:table-cell>
            <table:table-cell table:style-name="表格9.A1" office:value-type="string">
              <text:p text:style-name="P19">比對方向</text:p>
            </table:table-cell>
            <table:table-cell table:style-name="表格9.A1" office:value-type="string">
              <text:p text:style-name="P19">此題比較次數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3">前向法（Forward）</text:p>
          </table:table-cell>
          <table:table-cell table:style-name="表格9.A2" office:value-type="string">
            <text:p text:style-name="P23">左→右</text:p>
          </table:table-cell>
          <table:table-cell table:style-name="表格9.C2" office:value-type="string">
            <text:p text:style-name="P26">17 次</text:p>
          </table:table-cell>
        </table:table-row>
        <table:table-row table:style-name="表格9.1">
          <table:table-cell table:style-name="表格9.A2" office:value-type="string">
            <text:p text:style-name="P23">後向法（Backward）</text:p>
          </table:table-cell>
          <table:table-cell table:style-name="表格9.A2" office:value-type="string">
            <text:p text:style-name="P23">右→左</text:p>
          </table:table-cell>
          <table:table-cell table:style-name="表格9.C3" office:value-type="string">
            <text:p text:style-name="P30">18 次</text:p>
          </table:table-cell>
        </table:table-row>
      </table:table>
      <text:p text:style-name="P8"><text:soft-page-break/><text:span text:style-name="T43">⚠ </text:span><text:span text:style-name="T45">此題後向法反而多 1 次（pos 0 多比了 2 次），但這只是這題的特例，不代表後向法永遠比較慢。</text:span></text:p>
      <text:p text:style-name="P5"/>
      <text:p text:style-name="Standard"/>
      <text:h text:style-name="P17" text:outline-level="1">第六章　時間複雜度深入解析</text:h>
      <text:p text:style-name="P5"/>
      <text:p text:style-name="P32">◆ Big-O 是什麼？</text:p>
      <text:p text:style-name="P11"><text:span text:style-name="T15">Big-O 符號用來描述「</text:span><text:span text:style-name="T50">資料量變大</text:span><text:span text:style-name="T70">時，</text:span><text:span text:style-name="T72">演算法工作量</text:span><text:span text:style-name="T84">增加的速度</text:span><text:span text:style-name="T15">」，我們只關心最壞情況下的最高次項。</text:span></text:p>
      <text:p text:style-name="P5"/>
      <text:p text:style-name="P32">◆ O(1) / O(log n) / O(n) / O(n²) 感受對照</text:p>
      <table:table table:name="表格10" table:style-name="表格10">
        <table:table-column table:style-name="表格10.A"/>
        <table:table-column table:style-name="表格10.B" table:number-columns-repeated="2"/>
        <table:table-column table:style-name="表格10.D"/>
        <table:table-column table:style-name="表格10.B"/>
        <table:table-column table:style-name="表格10.D"/>
        <table:table-column table:style-name="表格10.B"/>
        <table:table-column table:style-name="表格10.H"/>
        <table:table-header-rows>
          <table:table-row table:style-name="表格10.1">
            <table:table-cell table:style-name="表格10.A1" office:value-type="string">
              <text:p text:style-name="P19">n =</text:p>
            </table:table-cell>
            <table:table-cell table:style-name="表格10.A1" office:value-type="string">
              <text:p text:style-name="P19">10</text:p>
            </table:table-cell>
            <table:table-cell table:style-name="表格10.A1" office:value-type="string">
              <text:p text:style-name="P19">100</text:p>
            </table:table-cell>
            <table:table-cell table:style-name="表格10.A1" office:value-type="string">
              <text:p text:style-name="P19">1K</text:p>
            </table:table-cell>
            <table:table-cell table:style-name="表格10.A1" office:value-type="string">
              <text:p text:style-name="P19">1M</text:p>
            </table:table-cell>
            <table:table-cell table:style-name="表格10.A1" office:value-type="string">
              <text:p text:style-name="P19">1B</text:p>
            </table:table-cell>
            <table:table-cell table:style-name="表格10.A1" office:value-type="string">
              <text:p text:style-name="P19">演算法例子</text:p>
            </table:table-cell>
            <table:table-cell table:style-name="表格10.A1" office:value-type="string">
              <text:p text:style-name="P19">速度感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3">O(1)</text:p>
          </table:table-cell>
          <table:table-cell table:style-name="表格10.A2" office:value-type="string">
            <text:p text:style-name="P23">1</text:p>
          </table:table-cell>
          <table:table-cell table:style-name="表格10.A2" office:value-type="string">
            <text:p text:style-name="P23">1</text:p>
          </table:table-cell>
          <table:table-cell table:style-name="表格10.A2" office:value-type="string">
            <text:p text:style-name="P23">1</text:p>
          </table:table-cell>
          <table:table-cell table:style-name="表格10.A2" office:value-type="string">
            <text:p text:style-name="P23">1</text:p>
          </table:table-cell>
          <table:table-cell table:style-name="表格10.A2" office:value-type="string">
            <text:p text:style-name="P23">1</text:p>
          </table:table-cell>
          <table:table-cell table:style-name="表格10.G2" office:value-type="string">
            <text:p text:style-name="P23">直接取值</text:p>
          </table:table-cell>
          <table:table-cell table:style-name="表格10.A2" office:value-type="string">
            <text:p text:style-name="P39">⚡ 極快</text:p>
          </table:table-cell>
        </table:table-row>
        <table:table-row table:style-name="表格10.1">
          <table:table-cell table:style-name="表格10.A3" office:value-type="string">
            <text:p text:style-name="P23">O(log n)</text:p>
          </table:table-cell>
          <table:table-cell table:style-name="表格10.A3" office:value-type="string">
            <text:p text:style-name="P23">4</text:p>
          </table:table-cell>
          <table:table-cell table:style-name="表格10.A3" office:value-type="string">
            <text:p text:style-name="P23">7</text:p>
          </table:table-cell>
          <table:table-cell table:style-name="表格10.A3" office:value-type="string">
            <text:p text:style-name="P23">10</text:p>
          </table:table-cell>
          <table:table-cell table:style-name="表格10.A3" office:value-type="string">
            <text:p text:style-name="P23">20</text:p>
          </table:table-cell>
          <table:table-cell table:style-name="表格10.A3" office:value-type="string">
            <text:p text:style-name="P23">30</text:p>
          </table:table-cell>
          <table:table-cell table:style-name="表格10.G2" office:value-type="string">
            <text:p text:style-name="P23">Binary Search</text:p>
          </table:table-cell>
          <table:table-cell table:style-name="表格10.A3" office:value-type="string">
            <text:p text:style-name="P39">🚀 非常快</text:p>
          </table:table-cell>
        </table:table-row>
        <table:table-row table:style-name="表格10.1">
          <table:table-cell table:style-name="表格10.A4" office:value-type="string">
            <text:p text:style-name="P23">O(n)</text:p>
          </table:table-cell>
          <table:table-cell table:style-name="表格10.G2" office:value-type="string">
            <text:p text:style-name="P23">10</text:p>
          </table:table-cell>
          <table:table-cell table:style-name="表格10.G2" office:value-type="string">
            <text:p text:style-name="P23">100</text:p>
          </table:table-cell>
          <table:table-cell table:style-name="表格10.G2" office:value-type="string">
            <text:p text:style-name="P23">1,000</text:p>
          </table:table-cell>
          <table:table-cell table:style-name="表格10.G2" office:value-type="string">
            <text:p text:style-name="P23">1,000,000</text:p>
          </table:table-cell>
          <table:table-cell table:style-name="表格10.G2" office:value-type="string">
            <text:p text:style-name="P23">10億</text:p>
          </table:table-cell>
          <table:table-cell table:style-name="表格10.G2" office:value-type="string">
            <text:p text:style-name="P23">Linear Search</text:p>
          </table:table-cell>
          <table:table-cell table:style-name="表格10.A4" office:value-type="string">
            <text:p text:style-name="P30">👍 可接受</text:p>
          </table:table-cell>
        </table:table-row>
        <table:table-row table:style-name="表格10.1">
          <table:table-cell table:style-name="表格10.A5" office:value-type="string">
            <text:p text:style-name="P23">O(n²)</text:p>
          </table:table-cell>
          <table:table-cell table:style-name="表格10.G2" office:value-type="string">
            <text:p text:style-name="P23">100</text:p>
          </table:table-cell>
          <table:table-cell table:style-name="表格10.G2" office:value-type="string">
            <text:p text:style-name="P23">10,000</text:p>
          </table:table-cell>
          <table:table-cell table:style-name="表格10.G2" office:value-type="string">
            <text:p text:style-name="P23">1,000,000</text:p>
          </table:table-cell>
          <table:table-cell table:style-name="表格10.A5" office:value-type="string">
            <text:p text:style-name="P41">10¹²</text:p>
          </table:table-cell>
          <table:table-cell table:style-name="表格10.A5" office:value-type="string">
            <text:p text:style-name="P43">💀 過慢</text:p>
          </table:table-cell>
          <table:table-cell table:style-name="表格10.G2" office:value-type="string">
            <text:p text:style-name="P23">Ternary（壞）</text:p>
          </table:table-cell>
          <table:table-cell table:style-name="表格10.A5" office:value-type="string">
            <text:p text:style-name="P41">💀 超慢</text:p>
          </table:table-cell>
        </table:table-row>
      </table:table>
      <text:p text:style-name="P5"/>
      <text:p text:style-name="P7"><text:span text:style-name="T6">【口訣記憶】 </text:span><text:span text:style-name="T15">O(1) &lt; O(log n) &lt; O(n) &lt; O(n log n) &lt; O(n²) &lt; O(2ⁿ)，愈左邊愈快</text:span></text:p>
      <text:p text:style-name="P5"/>
      <text:p text:style-name="Standard"/>
      <text:h text:style-name="P17" text:outline-level="1">第七章　考試速記口訣與核心關鍵字</text:h>
      <text:p text:style-name="P5"/>
      <text:h text:style-name="P15" text:outline-level="2">7-1　最終記憶版（背這些就夠了）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header-rows>
          <table:table-row table:style-name="表格11.1">
            <table:table-cell table:style-name="表格11.A1" office:value-type="string">
              <text:p text:style-name="P19">演算法</text:p>
            </table:table-cell>
            <table:table-cell table:style-name="表格11.A1" office:value-type="string">
              <text:p text:style-name="P19">核心口訣</text:p>
            </table:table-cell>
            <table:table-cell table:style-name="表格11.A1" office:value-type="string">
              <text:p text:style-name="P19">關鍵條件 / 複雜度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33">Linear Search</text:p>
          </table:table-cell>
          <table:table-cell table:style-name="表格11.B2" office:value-type="string">
            <text:p text:style-name="P23">一個一個直線往後找</text:p>
          </table:table-cell>
          <table:table-cell table:style-name="表格11.B2" office:value-type="string">
            <text:p text:style-name="P23">迴圈/遞迴均 O(n)；不需排序</text:p>
          </table:table-cell>
        </table:table-row>
        <table:table-row table:style-name="表格11.1">
          <table:table-cell table:style-name="表格11.A3" office:value-type="string">
            <text:p text:style-name="P33">Binary Search</text:p>
          </table:table-cell>
          <table:table-cell table:style-name="表格11.B2" office:value-type="string">
            <text:p text:style-name="P23">每次砍一半！BinSearch 每次砍一半</text:p>
          </table:table-cell>
          <table:table-cell table:style-name="表格11.B2" office:value-type="string">
            <text:p text:style-name="P23">需排序；O(log n)；low/high/mid</text:p>
          </table:table-cell>
        </table:table-row>
        <table:table-row table:style-name="表格11.1">
          <table:table-cell table:style-name="表格11.A4" office:value-type="string">
            <text:p text:style-name="P33">Ternary Search</text:p>
          </table:table-cell>
          <table:table-cell table:style-name="表格11.B2" office:value-type="string">
            <text:p text:style-name="P23">切三塊，兩個 pivot（mid1, mid2）</text:p>
          </table:table-cell>
          <table:table-cell table:style-name="表格11.B2" office:value-type="string">
            <text:p text:style-name="P23">未排序+partition；最壞 O(n²)；Best O(n)</text:p>
          </table:table-cell>
        </table:table-row>
        <table:table-row table:style-name="表格11.1">
          <table:table-cell table:style-name="表格11.A2" office:value-type="string">
            <text:p text:style-name="P33">字串前向法</text:p>
          </table:table-cell>
          <table:table-cell table:style-name="表格11.B2" office:value-type="string">
            <text:p text:style-name="P23">從左比，pos 0 開始逐位對齊</text:p>
          </table:table-cell>
          <table:table-cell table:style-name="表格11.B2" office:value-type="string">
            <text:p text:style-name="P23">此題：17 次</text:p>
          </table:table-cell>
        </table:table-row>
        <table:table-row table:style-name="表格11.1">
          <table:table-cell table:style-name="表格11.A2" office:value-type="string">
            <text:p text:style-name="P33">字串後向法</text:p>
          </table:table-cell>
          <table:table-cell table:style-name="表格11.B2" office:value-type="string">
            <text:p text:style-name="P23">從右比，先比 pattern 末字</text:p>
          </table:table-cell>
          <table:table-cell table:style-name="表格11.B2" office:value-type="string">
            <text:p text:style-name="P23">此題：18 次</text:p>
          </table:table-cell>
        </table:table-row>
      </table:table>
      <text:p text:style-name="P5"/>
      <text:h text:style-name="P16" text:outline-level="2">7-2　名詞解釋速查</text:h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P19">名詞</text:p>
            </table:table-cell>
            <table:table-cell table:style-name="表格12.A1" office:value-type="string">
              <text:p text:style-name="P19">解釋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33">NULL</text:p>
          </table:table-cell>
          <table:table-cell table:style-name="表格12.B2" office:value-type="string">
            <text:p text:style-name="P21">空指標，代表「沒有資料」或「走到盡頭」，在 C 語言中為 0 / (void*)0</text:p>
          </table:table-cell>
        </table:table-row>
        <table:table-row table:style-name="表格12.1">
          <table:table-cell table:style-name="表格12.A2" office:value-type="string">
            <text:p text:style-name="P33">p-&gt;data</text:p>
          </table:table-cell>
          <table:table-cell table:style-name="表格12.B3" office:value-type="string">
            <text:p text:style-name="P21">指標 p 指向的節點中，取出「資料欄位」的值（-&gt; 是 C 語言指標成員存取）</text:p>
          </table:table-cell>
        </table:table-row>
        <table:table-row table:style-name="表格12.1">
          <table:table-cell table:style-name="表格12.A2" office:value-type="string">
            <text:p text:style-name="P33">p-&gt;next</text:p>
          </table:table-cell>
          <table:table-cell table:style-name="表格12.B4" office:value-type="string">
            <text:p text:style-name="P21">指標 p 指向的節點中，取出「下一個節點的指標」</text:p>
          </table:table-cell>
        </table:table-row>
        <table:table-row table:style-name="表格12.1">
          <table:table-cell table:style-name="表格12.A2" office:value-type="string">
            <text:p text:style-name="P33">low / high</text:p>
          </table:table-cell>
          <table:table-cell table:style-name="表格12.B5" office:value-type="string">
            <text:p text:style-name="P21">Binary Search 的搜尋範圍邊界，low 左邊界，high 右邊界</text:p>
          </table:table-cell>
        </table:table-row>
        <table:table-row table:style-name="表格12.1">
          <table:table-cell table:style-name="表格12.A2" office:value-type="string">
            <text:p text:style-name="P33">mid</text:p>
          </table:table-cell>
          <table:table-cell table:style-name="表格12.B6" office:value-type="string">
            <text:p text:style-name="P21">中間 index，計算公式：mid = (low + high) / 2</text:p>
          </table:table-cell>
        </table:table-row>
        <table:table-row table:style-name="表格12.1">
          <table:table-cell table:style-name="表格12.A2" office:value-type="string">
            <text:p text:style-name="P33">return -1</text:p>
          </table:table-cell>
          <table:table-cell table:style-name="表格12.B7" office:value-type="string">
            <text:p text:style-name="P21">找不到目標時回傳 -1，作為「不存在」的訊號</text:p>
          </table:table-cell>
        </table:table-row>
        <table:table-row table:style-name="表格12.1">
          <table:table-cell table:style-name="表格12.A2" office:value-type="string">
            <text:p text:style-name="P33">pos</text:p>
          </table:table-cell>
          <table:table-cell table:style-name="表格12.B8" office:value-type="string">
            <text:p text:style-name="P21">字串比對中，pattern 目前對齊 text 的起始 index</text:p>
          </table:table-cell>
        </table:table-row>
        <table:table-row table:style-name="表格12.1">
          <table:table-cell table:style-name="表格12.A2" office:value-type="string">
            <text:p text:style-name="P33">text / pattern</text:p>
          </table:table-cell>
          <table:table-cell table:style-name="表格12.B9" office:value-type="string">
            <text:p text:style-name="P21">text 是被搜尋的長字串；pattern 是要尋找的短字串</text:p>
          </table:table-cell>
        </table:table-row>
        <table:table-row table:style-name="表格12.1">
          <table:table-cell table:style-name="表格12.A2" office:value-type="string">
            <text:p text:style-name="P33">O(n)</text:p>
          </table:table-cell>
          <table:table-cell table:style-name="表格12.B10" office:value-type="string">
            <text:p text:style-name="P21">時間複雜度：比較次數隨資料量 n 線性成長</text:p>
          </table:table-cell>
        </table:table-row>
        <table:table-row table:style-name="表格12.1">
          <table:table-cell table:style-name="表格12.A2" office:value-type="string">
            <text:p text:style-name="P33">O(log n)</text:p>
          </table:table-cell>
          <table:table-cell table:style-name="表格12.B11" office:value-type="string">
            <text:p text:style-name="P21">時間複雜度：比較次數是 log₂n，資料加倍只多比一次</text:p>
          </table:table-cell>
        </table:table-row>
        <table:table-row table:style-name="表格12.1">
          <table:table-cell table:style-name="表格12.A2" office:value-type="string">
            <text:p text:style-name="P33">pivot</text:p>
          </table:table-cell>
          <table:table-cell table:style-name="表格12.B12" office:value-type="string">
            <text:p text:style-name="P21">切割點，Ternary Search 中用 mid1、mid2 將資料切成三段</text:p>
          </table:table-cell>
        </table:table-row>
        <table:table-row table:style-name="表格12.1">
          <table:table-cell table:style-name="表格12.A2" office:value-type="string">
            <text:p text:style-name="P33">遞迴（Recursion）</text:p>
          </table:table-cell>
          <table:table-cell table:style-name="表格12.B13" office:value-type="string">
            <text:p text:style-name="P21">函式呼叫自己，每次縮小問題規模，直到觸發終止條件（base case）</text:p>
          </table:table-cell>
        </table:table-row>
      </table:table>
      <text:p text:style-name="P5"/>
      <text:h text:style-name="P10" text:outline-level="2"><text:soft-page-break/><text:span text:style-name="T1">7-3　考點整理（按出題頻率）</text:span></text:h>
      <text:list text:continue-list="list1917896334" text:style-name="WWNum3">
        <text:list-item text:start-value="1">
          <text:p text:style-name="P54">Binary Search 的 low/high/mid 移動過程（最常考，務必能手算）</text:p>
        </text:list-item>
        <text:list-item>
          <text:p text:style-name="P54">為什麼 Binary Search 必須排序？（常考申論）</text:p>
        </text:list-item>
        <text:list-item>
          <text:p text:style-name="P54">Linear Search 迴圈版與遞迴版程式碼（會寫、會看）</text:p>
        </text:list-item>
        <text:list-item>
          <text:p text:style-name="P54">O(n) vs O(log n) 的差異與直覺（必記）</text:p>
        </text:list-item>
        <text:list-item>
          <text:p text:style-name="P54">字串比對前向法：逐 pos 計算比較次數（需算出總次數 17）</text:p>
        </text:list-item>
        <text:list-item>
          <text:p text:style-name="P54">字串比對後向法：逐 pos 計算比較次數（需算出總次數 18）</text:p>
        </text:list-item>
        <text:list-item>
          <text:p text:style-name="P54">Ternary Search：T(n)=T(n-2)+O(n) 解出 O(n²)，知道最壞/最佳</text:p>
        </text:list-item>
        <text:list-item>
          <text:p text:style-name="P54">NULL 的意義、return -1 的意義</text:p>
        </text:list-item>
      </text:list>
      <text:p text:style-name="P5"/>
      <text:p text:style-name="P12"/>
      <text:p text:style-name="P29">本筆記涵蓋圖片全部內容，並補充完整推導與範例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247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64</meta:editing-cycles>
    <meta:creation-date>2026-05-26T13:15:39.891000000</meta:creation-date>
    <dc:date>2026-05-27T16:21:20.222000000</dc:date>
    <meta:generator>MODA_ODF_Application_Tools/3.8.4.2$Windows_X86_64 LibreOffice_project/4fb77107d5af14329e08085efe4fa19b5633383a</meta:generator>
    <meta:editing-duration>PT8H40M43S</meta:editing-duration>
    <meta:document-statistic meta:table-count="18" meta:image-count="0" meta:object-count="0" meta:page-count="17" meta:paragraph-count="673" meta:word-count="5154" meta:character-count="10217" meta:non-whitespace-character-count="8618"/>
  </office:meta>
</office:document-meta>
</file>