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6" style:family="paragraph" style:parent-style-name="Standard">
      <style:text-properties officeooo:paragraph-rsid="0043cb14"/>
    </style:style>
    <style:style style:name="P7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9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12" style:family="paragraph" style:parent-style-name="Standard">
      <style:paragraph-properties fo:margin-top="0.071cm" fo:margin-bottom="0.071cm" style:contextual-spacing="false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7" style:family="paragraph" style:parent-style-name="Standard">
      <style:paragraph-properties fo:margin-top="0.212cm" fo:margin-bottom="0.071cm" style:contextual-spacing="false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20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23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.106cm" style:contextual-spacing="false"/>
    </style:style>
    <style:style style:name="P26" style:family="paragraph" style:parent-style-name="Standard">
      <style:paragraph-properties fo:margin-top="0.318cm" fo:margin-bottom="0.106cm" style:contextual-spacing="false"/>
    </style:style>
    <style:style style:name="P27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28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9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30" style:family="paragraph" style:parent-style-name="Standard">
      <style:text-properties fo:color="#eeeeee" loext:opacity="100%" officeooo:paragraph-rsid="0043cb14"/>
    </style:style>
    <style:style style:name="P31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32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33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3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35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6" style:family="paragraph" style:parent-style-name="Heading_20_1">
      <style:paragraph-properties fo:margin-left="0cm" fo:margin-right="0cm" fo:margin-top="0.564cm" fo:margin-bottom="0.212cm" style:contextual-spacing="false" fo:text-indent="0cm" style:auto-text-indent="false" fo:break-before="page"/>
    </style:style>
    <style:style style:name="P37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58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59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61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18ffff" loext:opacity="100%" fo:background-color="#d500f9" loext:char-shading-value="0"/>
    </style:style>
    <style:style style:name="T63" style:family="text">
      <style:text-properties fo:color="#18ffff" loext:opacity="100%" fo:background-color="#d500f9" loext:char-shading-value="0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color="#c6ff00" loext:opacity="100%"/>
    </style:style>
    <style:style style:name="T66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67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68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69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70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1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5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6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7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7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79" style:family="text">
      <style:text-properties fo:color="#c6ff00" loext:opacity="100%" fo:font-weight="bold" fo:background-color="#ffff00" loext:char-shading-value="0" style:font-weight-asian="bold" style:font-weight-complex="bold"/>
    </style:style>
    <style:style style:name="T80" style:family="text">
      <style:text-properties fo:color="#c6ff00" loext:opacity="100%" fo:background-color="#3d5afe" loext:char-shading-value="0"/>
    </style:style>
    <style:style style:name="T81" style:family="text">
      <style:text-properties fo:color="#c6ff00" loext:opacity="100%" fo:background-color="#f50057" loext:char-shading-value="0"/>
    </style:style>
    <style:style style:name="T82" style:family="text">
      <style:text-properties fo:color="#c6ff00" loext:opacity="100%" fo:background-color="#f50057" loext:char-shading-value="0"/>
    </style:style>
    <style:style style:name="T83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4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5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7" style:family="text">
      <style:text-properties fo:color="#ff3d00" loext:opacity="100%" fo:background-color="#64ffda" loext:char-shading-value="0"/>
    </style:style>
    <style:style style:name="T8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9" style:family="text">
      <style:text-properties fo:color="#ffff00" loext:opacity="100%"/>
    </style:style>
    <style:style style:name="T9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4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5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6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99" style:family="text">
      <style:text-properties fo:color="#ffff00" loext:opacity="100%" fo:background-color="#3d5afe" loext:char-shading-value="0"/>
    </style:style>
    <style:style style:name="T100" style:family="text">
      <style:text-properties fo:color="#ffff00" loext:opacity="100%" fo:background-color="#3d5afe" loext:char-shading-value="0"/>
    </style:style>
    <style:style style:name="T101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2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3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105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106" style:family="text">
      <style:text-properties fo:color="#ffd740" loext:opacity="100%"/>
    </style:style>
    <style:style style:name="T107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11" style:family="text">
      <style:text-properties fo:color="#ffd740" loext:opacity="100%" fo:background-color="#000000" loext:char-shading-value="0"/>
    </style:style>
    <style:style style:name="T112" style:family="text">
      <style:text-properties fo:color="#ffd740" loext:opacity="100%" fo:background-color="#000000" loext:char-shading-value="0"/>
    </style:style>
    <style:style style:name="T11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4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5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6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7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18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9" style:family="text">
      <style:text-properties fo:color="#ff5252" loext:opacity="100%"/>
    </style:style>
    <style:style style:name="T120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1" style:family="text">
      <style:text-properties fo:color="#ff4081" loext:opacity="100%"/>
    </style:style>
    <style:style style:name="T122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3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4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5" style:family="text">
      <style:text-properties fo:color="#ff4081" loext:opacity="100%" fo:font-weight="bold" style:font-weight-asian="bold" style:font-weight-complex="bold"/>
    </style:style>
    <style:style style:name="T126" style:family="text">
      <style:text-properties fo:color="#ff4081" loext:opacity="100%" fo:font-weight="bold" fo:background-color="#f8bbd0" loext:char-shading-value="0" style:font-weight-asian="bold" style:font-weight-complex="bold"/>
    </style:style>
    <style:style style:name="T127" style:family="text">
      <style:text-properties fo:color="#ff4081" loext:opacity="100%" fo:font-weight="bold" fo:background-color="#f8bbd0" loext:char-shading-value="0" style:font-weight-asian="bold" style:font-weight-complex="bold"/>
    </style:style>
    <style:style style:name="T128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29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1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2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5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7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8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9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0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1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2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3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4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5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6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47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48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9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0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51" style:family="text">
      <style:text-properties fo:font-weight="bold" fo:background-color="#ffd740" loext:char-shading-value="0" style:font-weight-asian="bold" style:font-weight-complex="bold"/>
    </style:style>
    <style:style style:name="T152" style:family="text">
      <style:text-properties fo:font-weight="bold" fo:background-color="#ffd740" loext:char-shading-value="0" style:font-weight-asian="bold" style:font-weight-complex="bold"/>
    </style:style>
    <style:style style:name="T153" style:family="text">
      <style:text-properties fo:font-weight="bold" fo:background-color="#ff4081" loext:char-shading-value="0" style:font-weight-asian="bold" style:font-weight-complex="bold"/>
    </style:style>
    <style:style style:name="T154" style:family="text">
      <style:text-properties fo:font-weight="bold" fo:background-color="#ffff00" loext:char-shading-value="0" style:font-weight-asian="bold" style:font-weight-complex="bold"/>
    </style:style>
    <style:style style:name="T155" style:family="text">
      <style:text-properties fo:font-weight="bold" fo:background-color="#76ff03" loext:char-shading-value="0" style:font-weight-asian="bold" style:font-weight-complex="bold"/>
    </style:style>
    <style:style style:name="T156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57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8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9" style:family="text">
      <style:text-properties fo:background-color="#000000" loext:char-shading-value="0"/>
    </style:style>
    <style:style style:name="T160" style:family="text">
      <style:text-properties fo:background-color="#000000" loext:char-shading-value="0"/>
    </style:style>
    <style:style style:name="T161" style:family="text">
      <style:text-properties fo:color="#64ffda" loext:opacity="100%"/>
    </style:style>
    <style:style style:name="T162" style:family="text">
      <style:text-properties fo:color="#448aff" loext:opacity="100%"/>
    </style:style>
    <style:style style:name="T163" style:family="text">
      <style:text-properties fo:color="#2979ff" loext:opacity="100%"/>
    </style:style>
    <style:style style:name="T164" style:family="text">
      <style:text-properties fo:background-color="#ffff00" loext:char-shading-value="0"/>
    </style:style>
    <style:style style:name="T165" style:family="text">
      <style:text-properties fo:background-color="#ffff00" loext:char-shading-value="0"/>
    </style:style>
    <style:style style:name="T166" style:family="text">
      <style:text-properties fo:background-color="#ffd740" loext:char-shading-value="0"/>
    </style:style>
    <style:style style:name="T167" style:family="text">
      <style:text-properties fo:background-color="#ffd740" loext:char-shading-value="0"/>
    </style:style>
    <style:style style:name="T168" style:family="text">
      <style:text-properties fo:background-color="#ff4081" loext:char-shading-value="0"/>
    </style:style>
    <style:style style:name="T169" style:family="text">
      <style:text-properties fo:background-color="#ff4081" loext:char-shading-value="0"/>
    </style:style>
    <style:style style:name="T170" style:family="text">
      <style:text-properties fo:background-color="#76ff03" loext:char-shading-value="0"/>
    </style:style>
    <style:style style:name="T171" style:family="text">
      <style:text-properties fo:background-color="#76ff03" loext:char-shading-value="0"/>
    </style:style>
    <style:style style:name="T172" style:family="text">
      <style:text-properties fo:background-color="#64ffda" loext:char-shading-value="0"/>
    </style:style>
    <style:style style:name="T173" style:family="text">
      <style:text-properties fo:background-color="#64ffda" loext:char-shading-value="0"/>
    </style:style>
    <style:style style:name="T174" style:family="text">
      <style:text-properties fo:background-color="#3d5afe" loext:char-shading-value="0"/>
    </style:style>
    <style:style style:name="T175" style:family="text">
      <style:text-properties fo:background-color="#3d5afe" loext:char-shading-value="0"/>
    </style:style>
    <style:style style:name="T176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177" style:family="text">
      <style:text-properties fo:color="#ff6e40" loext:opacity="100%" fo:background-color="#64ffda" loext:char-shading-value="0"/>
    </style:style>
    <style:style style:name="T178" style:family="text">
      <style:text-properties fo:color="#ff6e40" loext:opacity="100%" fo:font-weight="bold" fo:background-color="#64ffda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1">圖形 </text:span><text:span text:style-name="T15">(Graph) </text:span><text:span text:style-name="T1">完整學習筆記</text:span></text:p>
      <text:p text:style-name="P8" loext:marker-style-name="T20"><text:span text:style-name="T19">BFS · DFS · Topological Sort · Prim MST · Adjacency Multilist</text:span><text:span text:style-name="T20"/></text:p>
      <text:p text:style-name="P9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34" text:outline-level="1" loext:marker-style-name="T4"><text:span text:style-name="T3">一、</text:span><text:span text:style-name="T4">Graph</text:span><text:span text:style-name="T3">（圖）基本概念與圖示</text:span></text:h>
      <text:p text:style-name="P12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"/>
      <text:p text:style-name="P13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3" loext:marker-style-name="T33"><text:span text:style-name="T32">一個頂點連接的邊數。有向圖分</text:span><text:span text:style-name="T55"> </text:span><text:span text:style-name="T59">in-degree</text:span><text:span text:style-name="T55">（進入）</text:span><text:span text:style-name="T32">與 </text:span><text:span text:style-name="T66">out-degree</text:span><text:span text:style-name="T68">（離開）</text:span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DAG</text:span><text:span text:style-name="T9"/></text:p>
          </table:table-cell>
          <table:table-cell table:style-name="表格3.B2" office:value-type="string">
            <text:p text:style-name="P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34" text:outline-level="1" loext:marker-style-name="T4"><text:span text:style-name="T3">二、圖的三種表示法（含完整圖解）</text:span><text:span text:style-name="T4"/></text:h>
      <text:h text:style-name="P37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12" loext:marker-style-name="T33"><text:span text:style-name="T34">把圖</text:span><text:span text:style-name="T83">轉成一張 </text:span><text:span text:style-name="T84">V×V </text:span><text:span text:style-name="T83">的二維表格</text:span><text:span text:style-name="T32">，</text:span><text:span text:style-name="T55">兩點有邊填 </text:span><text:span text:style-name="T59">1</text:span><text:span text:style-name="T55">（或權重）</text:span><text:span text:style-name="T32">，</text:span><text:span text:style-name="T69">無邊填 </text:span><text:span text:style-name="T67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7"><text:span text:style-name="T47"><text:s text:c="2"/>問：為什麼空間是 </text:span><text:span text:style-name="T61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</text:span><text:span text:style-name="T90">矩陣大小</text:span><text:span text:style-name="T47"> = </text:span><text:span text:style-name="T101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7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7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→ </text:span><text:span text:style-name="T70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1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61">全部 V 個頂點都要算 → V × O(V)</text:span><text:span text:style-name="T47"> = O(V²) = O(n²)</text:span></text:p>
          </table:table-cell>
        </table:table-row>
      </table:table>
      <text:h text:style-name="P37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12" loext:marker-style-name="T33"><text:span text:style-name="T83">每個頂點建一條鏈結串列，只記錄「真正存在」的鄰居</text:span><text:span text:style-name="T32">，不存 </text:span><text:span text:style-name="T40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107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91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（這就是 </text:span><text:span text:style-name="T71">Adjacency List 的缺點：同一條邊存兩份</text:span><text:span text:style-name="T47">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① </text:span><text:span text:style-name="T91">V 個頂點的「起始節點」</text:span><text:span text:style-name="T47"> <text:s text:c="6"/>→ </text:span><text:span text:style-name="T61">V 個單元</text:span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② </text:span><text:span text:style-name="T91">每條邊在兩端各存一次</text:span><text:span text:style-name="T104"> </text:span><text:span text:style-name="T47"><text:s text:c="9"/>→ </text:span><text:span text:style-name="T61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61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A 的鄰接串列</text:span><text:span text:style-name="T47">：</text:span><text:span text:style-name="T107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這裡的箭頭</text:span><text:span text:style-name="T85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14">意思是「下一個節點」</text:span><text:span text:style-name="T47">，</text:span><text:span text:style-name="T118">不是圖的邊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07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61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92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115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（</text:span><text:span text:style-name="T61">A 分別連到 B、C、D</text:span><text:span text:style-name="T47">，</text:span><text:span text:style-name="T115">B/C/D 彼此之間沒有邊</text:span><text:span text:style-name="T47">）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7"><text:span text:style-name="T47"><text:s text:c="2"/></text:span><text:span text:style-name="T61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/></text:span><text:span text:style-name="T85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107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92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所以 </text:span><text:span text:style-name="T72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37" text:outline-level="2" loext:marker-style-name="T12"><text:span text:style-name="T12">2-3 Adjacency Multilist</text:span><text:span text:style-name="T13">（相鄰多重串列）</text:span></text:h>
      <text:p text:style-name="P12" loext:marker-style-name="T33"><text:span text:style-name="T32">先記住這一句話：</text:span><text:span text:style-name="T105">Adjacency Multilist</text:span><text:span text:style-name="T40"> = </text:span><text:span text:style-name="T32">為了讓</text:span><text:span text:style-name="T110">「同一條邊只存一次」</text:span><text:span text:style-name="T34">而發明的資料結構</text:span><text:span text:style-name="T32">。</text:span></text:p>
      <text:p text:style-name="P1"/>
      <text:p text:style-name="P13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→ </text:span><text:span text:style-name="T114">3 條邊，卻存了 6 份資料！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70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70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有人就想：</text:span><text:span text:style-name="T61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這樣</text:span><text:span text:style-name="T90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</text:span><text:span text:style-name="T108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→ </text:span><text:span text:style-name="T73">A 和 B 共用同一個 e1</text:span><text:span text:style-name="T47">，不再各自存一份。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7"><text:span text:style-name="T47"><text:s text:c="2"/></text:span><text:span text:style-name="T50">圖形有三條邊</text:span><text:span text:style-name="T47"> → </text:span><text:span text:style-name="T120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五步：</text:span><text:span text:style-name="T57">為什麼需要 </text:span><text:span text:style-name="T60">link1 </text:span><text:span text:style-name="T57">和 </text:span><text:span text:style-name="T60">link2</text:span><text:span text:style-name="T5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7"><text:span text:style-name="T47"><text:s text:c="2"/>問題：</text:span><text:span text:style-name="T85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/></text:span><text:span text:style-name="T93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93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但是 </text:span><text:span text:style-name="T74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114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→ 所以 </text:span><text:span text:style-name="T92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1：</text:span><text:span text:style-name="T61">給 V1（也就是 A）用</text:span><text:span text:style-name="T47">，</text:span><text:span text:style-name="T50">記錄</text:span><text:span text:style-name="T122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2：</text:span><text:span text:style-name="T61">給 V2（也就是 B）用</text:span><text:span text:style-name="T47">，</text:span><text:span text:style-name="T50">記錄</text:span><text:span text:style-name="T86">「B 的下一條邊」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7"><text:span text:style-name="T47"><text:s text:c="2"/>【站在 A 的角度】 </text:span><text:span text:style-name="T107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5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B 的角度】 </text:span><text:span text:style-name="T107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5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C 的角度】 </text:span><text:span text:style-name="T107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3"/></text:span><text:span text:style-name="T85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</text:span><text:span text:style-name="T61">A的下一條</text:span><text:span text:style-name="T47"> <text:s/>↑</text:span><text:span text:style-name="T61">B的下一條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4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6"/></text:span><text:span text:style-name="T94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6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6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2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2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考試申論題標準答案：</text:span><text:span text:style-name="T57">為什麼 </text:span><text:span text:style-name="T60">Edge </text:span><text:span text:style-name="T57">節點需要 </text:span><text:span text:style-name="T60">link1 </text:span><text:span text:style-name="T57">和 </text:span><text:span text:style-name="T60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1 端走訪其所有邊時</text:span><text:span text:style-name="T47">，需要 </text:span><text:span text:style-name="T95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2 端走訪其所有邊時</text:span><text:span text:style-name="T47">，需要 </text:span><text:span text:style-name="T95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</text:span><text:span text:style-name="T50">兩端的「下一條邊」</text:span><text:span text:style-name="T47">通常是</text:span><text:span text:style-name="T85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因此 </text:span><text:span text:style-name="T71">Edge 節點必須同時保存 link1 與 link2 兩個鏈結指標</text:span><text:span text:style-name="T47">。</text:span></text:p>
          </table:table-cell>
        </table:table-row>
      </table:table>
      <text:p text:style-name="P1"/>
      <text:p text:style-name="P13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61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7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93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需要看 n² 個格子 → </text:span><text:span text:style-name="T85">O(n²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7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93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48">檢查所有 e 條邊</text:span><text:span text:style-name="T90">（每條邊會從兩端各被看到一次）</text:span><text:span text:style-name="T92">→ 2e 步</text:span></text:p>
          </table:table-cell>
        </table:table-row>
        <table:table-row table:style-name="表格20.1">
          <table:table-cell table:style-name="表格20.A10" office:value-type="string">
            <text:p text:style-name="P2" loext:marker-style-name="T47"><text:span text:style-name="T47"><text:s text:c="4"/></text:span><text:span text:style-name="T129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總計 </text:span><text:span text:style-name="T85">n + 2e = O(n+e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37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3" loext:marker-style-name="T131"><text:span text:style-name="T130">比較項目</text:span><text:span text:style-name="T131"/></text:p>
          </table:table-cell>
          <table:table-cell table:style-name="表格21.A1" office:value-type="string">
            <text:p text:style-name="P10" loext:marker-style-name="T131"><text:span text:style-name="T134">Adjacency Matrix</text:span><text:span text:style-name="T131"/></text:p>
          </table:table-cell>
          <table:table-cell table:style-name="表格21.A1" office:value-type="string">
            <text:p text:style-name="P10" loext:marker-style-name="T131"><text:span text:style-name="T134">Adjacency List</text:span><text:span text:style-name="T131"/></text:p>
          </table:table-cell>
          <table:table-cell table:style-name="表格21.A1" office:value-type="string">
            <text:p text:style-name="P10" loext:marker-style-name="T131"><text:span text:style-name="T134">Adjacency Multilist</text:span><text:span text:style-name="T131"/></text:p>
          </table:table-cell>
          <table:table-cell table:style-name="表格21.A1" office:value-type="string">
            <text:p text:style-name="P3" loext:marker-style-name="T131"><text:span text:style-name="T130">備註</text:span><text:span text:style-name="T131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10" loext:marker-style-name="T136"><text:span text:style-name="T135">O(V²)</text:span><text:span text:style-name="T136"/></text:p>
          </table:table-cell>
          <table:table-cell table:style-name="表格21.C2" office:value-type="string">
            <text:p text:style-name="P10" loext:marker-style-name="T142"><text:span text:style-name="T140">O(V+E)</text:span><text:span text:style-name="T142"/></text:p>
          </table:table-cell>
          <table:table-cell table:style-name="表格21.C2" office:value-type="string">
            <text:p text:style-name="P10" loext:marker-style-name="T142"><text:span text:style-name="T140">O(V+E)</text:span><text:span text:style-name="T142"/></text:p>
          </table:table-cell>
          <table:table-cell table:style-name="表格21.E2" office:value-type="string">
            <text:p text:style-name="P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10" loext:marker-style-name="T142"><text:span text:style-name="T140">O(1)</text:span><text:span text:style-name="T142"/></text:p>
          </table:table-cell>
          <table:table-cell table:style-name="表格21.B2" office:value-type="string">
            <text:p text:style-name="P10" loext:marker-style-name="T136"><text:span text:style-name="T135">O(degree)</text:span><text:span text:style-name="T136"/></text:p>
          </table:table-cell>
          <table:table-cell table:style-name="表格21.B2" office:value-type="string">
            <text:p text:style-name="P10" loext:marker-style-name="T136"><text:span text:style-name="T135">O(degree)</text:span><text:span text:style-name="T136"/></text:p>
          </table:table-cell>
          <table:table-cell table:style-name="表格21.E2" office:value-type="string">
            <text:p text:style-name="P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10" loext:marker-style-name="T136"><text:span text:style-name="T135">O(n²)</text:span><text:span text:style-name="T136"/></text:p>
          </table:table-cell>
          <table:table-cell table:style-name="表格21.C2" office:value-type="string">
            <text:p text:style-name="P10" loext:marker-style-name="T142"><text:span text:style-name="T140">O(n+e)</text:span><text:span text:style-name="T142"/></text:p>
          </table:table-cell>
          <table:table-cell table:style-name="表格21.C2" office:value-type="string">
            <text:p text:style-name="P10" loext:marker-style-name="T142"><text:span text:style-name="T140">O(n+e)</text:span><text:span text:style-name="T142"/></text:p>
          </table:table-cell>
          <table:table-cell table:style-name="表格21.A2" office:value-type="string">
            <text:p text:style-name="P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10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10" loext:marker-style-name="T138"><text:span text:style-name="T137">存兩次（無向）</text:span><text:span text:style-name="T138"/></text:p>
          </table:table-cell>
          <table:table-cell table:style-name="表格21.C2" office:value-type="string">
            <text:p text:style-name="P10" loext:marker-style-name="T56"><text:span text:style-name="T55">只存一次 ✓</text:span><text:span text:style-name="T56"/></text:p>
          </table:table-cell>
          <table:table-cell table:style-name="表格21.E2" office:value-type="string">
            <text:p text:style-name="P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10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3"/>
          </table:table-cell>
        </table:table-row>
      </table:table>
      <text:p text:style-name="Standard"/>
      <text:h text:style-name="P34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12" loext:marker-style-name="T33"><text:span text:style-name="T42">Breadth-First</text:span><text:span text:style-name="T40"> Search</text:span><text:span text:style-name="T32">｜使用 </text:span><text:span text:style-name="T40">Queue</text:span><text:span text:style-name="T32">（</text:span><text:span text:style-name="T40">FIFO </text:span><text:span text:style-name="T32">佇列）</text:span></text:p>
      <text:p text:style-name="P1"/>
      <text:h text:style-name="P37" text:outline-level="2" loext:marker-style-name="T12"><text:span text:style-name="T12">3-1 </text:span><text:span text:style-name="T13">核心概念圖解</text:span></text:h>
      <text:p text:style-name="P13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3-2 BFS </text:span><text:span text:style-name="T13">逐步追蹤（詳細步驟）</text:span></text:h>
      <text:p text:style-name="P13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/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從 A 開始 BFS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24.A1" office:value-type="string">
            <text:p text:style-name="P3" loext:marker-style-name="T131"><text:span text:style-name="T130">動作</text:span><text:span text:style-name="T131"/></text:p>
          </table:table-cell>
          <table:table-cell table:style-name="表格24.A1" office:value-type="string">
            <text:p text:style-name="P10" loext:marker-style-name="T131"><text:span text:style-name="T134">Queue </text:span><text:span text:style-name="T130">狀態（左</text:span><text:span text:style-name="T134">=</text:span><text:span text:style-name="T130">隊首）</text:span></text:p>
          </table:table-cell>
          <table:table-cell table:style-name="表格24.A1" office:value-type="string">
            <text:p text:style-name="P10" loext:marker-style-name="T131"><text:span text:style-name="T130">已拜訪</text:span><text:span text:style-name="T131"/></text:p>
          </table:table-cell>
          <table:table-cell table:style-name="表格24.A1" office:value-type="string">
            <text:p text:style-name="P10" loext:marker-style-name="T131"><text:span text:style-name="T130">輸出</text:span><text:span text:style-name="T131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}</text:span><text:span text:style-name="T33"/></text:p>
          </table:table-cell>
          <table:table-cell table:style-name="表格24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①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10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10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③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10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10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⑤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142"><text:span text:style-name="T140">A B C D E</text:span><text:span text:style-name="T142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3-3 B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60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103">每個頂點最多被 enqueue / dequeue 一次</text:span><text:span text:style-name="T47"> <text:s/>→ </text:span><text:span text:style-name="T123">O(V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5">每條邊在處理時最多被檢查兩次（兩端各一）</text:span><text:span text:style-name="T47">→ </text:span><text:span text:style-name="T124">O(E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總計：</text:span><text:span text:style-name="T61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2"/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範例：</text:span><text:span text:style-name="T50">V=5，E=4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2">時間複雜度與 V+E 成正比</text:span><text:span text:style-name="T47">，此圖規模為 O(5+4) = O(9) （非常有效率）</text:span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60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72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103">最壞情況下</text:span><text:span text:style-name="T47">，</text:span><text:span text:style-name="T71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（例如</text:span><text:span text:style-name="T50">星形圖中</text:span><text:span text:style-name="T47">，</text:span><text:span text:style-name="T85">處理中心頂點後，其餘 V−1 個頂點同時進入 Queue</text:span><text:span text:style-name="T47">）</text:span></text:p>
          </table:table-cell>
        </table:table-row>
        <table:table-row table:style-name="表格27.1">
          <table:table-cell table:style-name="表格27.A1" office:value-type="string">
            <text:p text:style-name="P4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因此 </text:span><text:span text:style-name="T50">Queue 所需空間為</text:span><text:span text:style-name="T47"> </text:span><text:span text:style-name="T123">O(V)</text:span><text:span text:style-name="T47">。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另需 <text:span text:style-name="T151">visited 陣列記錄已拜訪頂點</text:span> → <text:span text:style-name="T75">O(V)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/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97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97">O(V)+O(V)=O(V)</text:span></text:p>
          </table:table-cell>
        </table:table-row>
      </table:table>
      <text:p text:style-name="P17" loext:marker-style-name="T145"><text:span text:style-name="T145"><text:s text:c="2"/>▎ ⚠ 重要前提：</text:span><text:span text:style-name="T58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8" loext:marker-style-name="T147"><text:span text:style-name="T146"><text:s text:c="2"/>上述 </text:span><text:span text:style-name="T94">BFS / DFS 的 O(V+E)是建立在 Graph 採用 Adjacency List或 Adjacency Multilist 儲存的情況下</text:span><text:span text:style-name="T146">。</text:span></text:p>
            <text:p text:style-name="P18" loext:marker-style-name="T147"><text:span text:style-name="T146"><text:s text:c="2"/>若 Graph 採用 Adjacency Matrix，</text:span><text:span text:style-name="T85">若使用 Adjacency Matrix</text:span><text:span text:style-name="T147">，每處理一個頂點需掃描整列（O(V)）找鄰居，共 V 個頂點 × O(V) = O(V²)，</text:span><text:span text:style-name="T85">時間複雜度為 O(V²)，而非 O(V+E)</text:span><text:span text:style-name="T147">。</text:span></text:p>
            <text:p text:style-name="P19" loext:marker-style-name="T146"><text:span text:style-name="T146"/></text:p>
            <text:p text:style-name="P19" loext:marker-style-name="T146"><text:span text:style-name="T146">【一句話結論】</text:span></text:p>
            <text:p text:style-name="P19" loext:marker-style-name="T146"><text:span text:style-name="T102">BFS 的 O(V+E) 成立，是因為 Graph 採用 Adjacency List</text:span><text:span text:style-name="T146">（或 Adjacency Multilist）</text:span><text:span text:style-name="T102">儲存</text:span><text:span text:style-name="T146">的前下，</text:span><text:span text:style-name="T109">BFS 的執行過程幾乎等同於「依序</text:span><text:span text:style-name="T96">掃描每個頂點的 Adjacency List 一遍</text:span><text:span text:style-name="T109">」</text:span><text:span text:style-name="T146">。</text:span></text:p>
          </table:table-cell>
        </table:table-row>
      </table:table>
      <text:p text:style-name="Standard"/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28"><text:span text:style-name="T161">BFS</text:span> 是<text:span text:style-name="T106">「演算法」（圖怎麼走）</text:span></text:p>
            <text:p text:style-name="P29"><text:span text:style-name="T163">Adjacency List</text:span> 是<text:span text:style-name="T89">「儲存方式」（圖怎麼存）</text:span></text:p>
            <text:p text:style-name="P21">兩者概念不同，但在實作上緊密結合。</text:p>
            <text:p text:style-name="P6"/>
            <text:p text:style-name="P21">BFS 虛擬碼：</text:p>
            <text:p text:style-name="P6"/>
            <text:p text:style-name="P21"><text:s text:c="2"/>while (<text:span text:style-name="T165">!Q.empty()</text:span>) {</text:p>
            <text:p text:style-name="P21"><text:s text:c="5"/><text:span text:style-name="T165"><text:s/>u = Q.front()</text:span>;</text:p>
            <text:p text:style-name="P6"><text:soft-page-break/><text:span text:style-name="T156"><text:s text:c="5"/></text:span><text:span text:style-name="T158"><text:s/>Q.pop()</text:span><text:span text:style-name="T156">;</text:span></text:p>
            <text:p text:style-name="P21"><text:s text:c="6"/>for (<text:span text:style-name="T152">each neighbor v of u</text:span>) { <text:s text:c="2"/>← 這一行！</text:p>
            <text:p text:style-name="P21"><text:s text:c="10"/>if (<text:span text:style-name="T153">!visited[v]</text:span>) {</text:p>
            <text:p text:style-name="P21"><text:s text:c="14"/>visited[v] = true;</text:p>
            <text:p text:style-name="P21"><text:s text:c="14"/><text:span text:style-name="T155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6"/>
            <text:p text:style-name="P21"><text:span text:style-name="T154">「for (each neighbor v of u)」實際上就是</text:span>：</text:p>
            <text:p text:style-name="P21">→ <text:span text:style-name="T64">掃描 u 的 Adjacency List 中每一個鄰居節點</text:span></text:p>
            <text:p text:style-name="P6"/>
            <text:p text:style-name="P21">因此，<text:span text:style-name="T113">BFS 的整體執行過程</text:span> =</text:p>
            <text:p text:style-name="P31">Queue（管理拜訪順序）+ 不停掃描各頂點的 Adjacency List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20">▎ 用<text:span text:style-name="T165">同一張圖</text:span>，<text:span text:style-name="T63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6"/>
            <text:p text:style-name="P29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30"/>
            <text:p text:style-name="P28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6"/>
            <text:p text:style-name="P21">觀察：<text:span text:style-name="T154">BFS 執行一遍</text:span>，<text:span text:style-name="T88">恰好把 A、B、C、D、E 的 Adjacency List</text:span></text:p>
            <text:p text:style-name="P31">全部從頭到尾各掃描了一次！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0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<text:span text:style-name="T152">每個頂點最多進出 Queue 一次</text:span></text:p>
            <text:p text:style-name="P21"><text:span text:style-name="T152"><text:s text:c="2"/>→ 共 V 個頂點</text:span> → <text:span text:style-name="T64">O(V)</text:span></text:p>
            <text:p text:style-name="P6"/>
            <text:p text:style-name="P21">O(E) 的來源（本質！）：</text:p>
            <text:p text:style-name="P21"><text:s text:c="2"/><text:span text:style-name="T152">所有 Adjacency List 中的鄰居節點，加起來總共有 2E 個</text:span></text:p>
            <text:p text:style-name="P21"><text:s text:c="2"/>（<text:span text:style-name="T98">每條邊出現在兩個頂點的串列各一次</text:span>）</text:p>
            <text:p text:style-name="P21"><text:s text:c="2"/><text:span text:style-name="T117">BFS 把它們全部掃描了一遍 → O(2E) = O(E</text:span><text:span text:style-name="T77">)</text:span></text:p>
            <text:p text:style-name="P6"/>
            <text:p text:style-name="P21">合計：<text:span text:style-name="T64">O(V) + O(E) = O(V + E)</text:span></text:p>
            <text:p text:style-name="P6"/>
            <text:p text:style-name="P21">口訣：</text:p>
            <text:p text:style-name="P22">O(V) = 每個頂點進出 Queue 一次</text:p>
            <text:p text:style-name="P31">O(E) = 所有 Adjacency List 被掃描一遍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6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6"><text:soft-page-break/><text:span text:style-name="T156"><text:s text:c="2"/>D[ 0 <text:s/>1 <text:s/>0 <text:s/>0 ]</text:span></text:p>
            <text:p text:style-name="P6"/>
            <text:p text:style-name="P32">BFS 處理頂點 A 時，不再是走一條短短的 Adjacency List，</text:p>
            <text:p text:style-name="P21"><text:span text:style-name="T76">而是必須掃描矩陣整列</text:span>：</text:p>
            <text:p text:style-name="P6"/>
            <text:p text:style-name="P21"><text:s text:c="2"/>matrix[A][0] → matrix[A][1] → matrix[A][2] → matrix[A][3]</text:p>
            <text:p text:style-name="P6"/>
            <text:p text:style-name="P33">無論這一列有幾個 1，都要掃完整的 V 格 → O(V)</text:p>
            <text:p text:style-name="P6"/>
            <text:p text:style-name="P21">V 個頂點都這樣做：V × O(V) = O(V²)</text:p>
            <text:p text:style-name="P6"/>
            <text:p text:style-name="P21">這就是為什麼<text:span text:style-name="T64">改用 Matrix，BFS 時間就從 O(V+E) 變成 O(V²)</text:span>。</text:p>
          </table:table-cell>
        </table:table-row>
      </table:table>
      <text:p text:style-name="P5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20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3">表示法</text:p>
          </table:table-cell>
          <table:table-cell table:style-name="表格58.A2" office:value-type="string">
            <text:p text:style-name="P23">BFS 時間</text:p>
          </table:table-cell>
          <table:table-cell table:style-name="表格58.A2" office:value-type="string">
            <text:p text:style-name="P23">DFS 時間</text:p>
          </table:table-cell>
          <table:table-cell table:style-name="表格58.A2" office:value-type="string">
            <text:p text:style-name="P23">原因</text:p>
          </table:table-cell>
        </table:table-row>
        <table:table-row table:style-name="表格58.1">
          <table:table-cell table:style-name="表格58.A3" office:value-type="string">
            <text:p text:style-name="P24">Adjacency Matrix</text:p>
          </table:table-cell>
          <table:table-cell table:style-name="表格58.A3" office:value-type="string">
            <text:p text:style-name="P24">O(V²)</text:p>
          </table:table-cell>
          <table:table-cell table:style-name="表格58.A3" office:value-type="string">
            <text:p text:style-name="P24">O(V²)</text:p>
          </table:table-cell>
          <table:table-cell table:style-name="表格58.A3" office:value-type="string">
            <text:p text:style-name="P24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4">Adjacency List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4">Adjacency Multilist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<text:span text:style-name="T176">同 List</text:span>，<text:span text:style-name="T178">邊節點只存一份但邏輯等價</text:span>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<text:span text:style-name="T113">「BFS 時間複雜度 O(V+E)」，</text:span></text:p>
            <text:p text:style-name="P21"><text:span text:style-name="T113"><text:s text:c="3"/>預設前提是 Graph 採用 Adjacency List 或 Adjacency Multilist 儲存</text:span>。</text:p>
            <text:p text:style-name="P21"><text:s text:c="3"/><text:span text:style-name="T128">若題目明確說明使用 Adjacency Matrix，則答案改為 O(V²)</text:span>。</text:p>
            <text:p text:style-name="P21"><text:s text:c="3"/>兩種情況都是公職考試常出現的細節，務必區分！</text:p>
          </table:table-cell>
        </table:table-row>
      </table:table>
      <text:p text:style-name="P5"/>
      <text:h text:style-name="P34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12" loext:marker-style-name="T33"><text:span text:style-name="T40">Depth-First Search</text:span><text:span text:style-name="T32">｜使用 </text:span><text:span text:style-name="T40">Stack</text:span><text:span text:style-name="T32">（</text:span><text:span text:style-name="T40">LIFO </text:span><text:span text:style-name="T32">堆疊）</text:span></text:p>
      <text:p text:style-name="P1"/>
      <text:h text:style-name="P37" text:outline-level="2" loext:marker-style-name="T12"><text:span text:style-name="T12">4-1 </text:span><text:span text:style-name="T13">核心概念圖解</text:span></text:h>
      <text:p text:style-name="P13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13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30.A1" office:value-type="string">
            <text:p text:style-name="P3" loext:marker-style-name="T131"><text:span text:style-name="T130">動作</text:span><text:span text:style-name="T131"/></text:p>
          </table:table-cell>
          <table:table-cell table:style-name="表格30.A1" office:value-type="string">
            <text:p text:style-name="P10" loext:marker-style-name="T131"><text:span text:style-name="T134">Stack </text:span><text:span text:style-name="T130">狀態（右</text:span><text:span text:style-name="T134">=</text:span><text:span text:style-name="T130">頂端）</text:span></text:p>
          </table:table-cell>
          <table:table-cell table:style-name="表格30.A1" office:value-type="string">
            <text:p text:style-name="P10" loext:marker-style-name="T131"><text:span text:style-name="T130">已拜訪</text:span><text:span text:style-name="T131"/></text:p>
          </table:table-cell>
          <table:table-cell table:style-name="表格30.A1" office:value-type="string">
            <text:p text:style-name="P10" loext:marker-style-name="T131"><text:span text:style-name="T130">輸出</text:span><text:span text:style-name="T131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}</text:span><text:span text:style-name="T33"/></text:p>
          </table:table-cell>
          <table:table-cell table:style-name="表格3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10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10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10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142"><text:span text:style-name="T140">A B D E C</text:span><text:span text:style-name="T142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4-3 D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→ O(V)</text:span><text:span text:style-name="T47"/></text:p>
          </table:table-cell>
        </table:table-row>
      </table:table>
      <text:p text:style-name="P17" loext:marker-style-name="T145"><text:span text:style-name="T145"><text:s text:c="2"/>▎ ⚠ 重要前提：O(V+E) 成立的條件（同 BFS）</text:span><text:span text:style-name="T145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8" loext:marker-style-name="T146"><text:span text:style-name="T146"><text:s text:c="2"/>DFS 的 O(V+E) 同樣以 Adjacency List 或 Multilist 為前提。</text:span><text:span text:style-name="T146"/></text:p>
            <text:p text:style-name="P2" loext:marker-style-name="T147"><text:span text:style-name="T147"><text:s text:c="2"/>改用 Adjacency Matrix 時，每個頂點需掃描完整的一列才能找到所有鄰居，</text:span><text:span text:style-name="T147"/></text:p>
            <text:p text:style-name="P25" loext:marker-style-name="T147"><text:span text:style-name="T147"><text:s text:c="2"/>共 V 個頂點 × O(V) = O(V²)。這是公職考試常考的細節，務必記住！</text:span><text:span text:style-name="T147"/></text:p>
          </table:table-cell>
        </table:table-row>
      </table:table>
      <text:h text:style-name="P37" text:outline-level="2" loext:marker-style-name="T12"><text:span text:style-name="T12">4-4 BFS vs DFS </text:span><text:span text:style-name="T13">核心差異</text:span></text:h>
      <text:p text:style-name="P13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3" loext:marker-style-name="T131"><text:span text:style-name="T130">項目</text:span><text:span text:style-name="T131"/></text:p>
          </table:table-cell>
          <table:table-cell table:style-name="表格36.A1" office:value-type="string">
            <text:p text:style-name="P10" loext:marker-style-name="T131"><text:span text:style-name="T134">BFS</text:span><text:span text:style-name="T130">（廣度優先）</text:span></text:p>
          </table:table-cell>
          <table:table-cell table:style-name="表格36.A1" office:value-type="string">
            <text:p text:style-name="P10" loext:marker-style-name="T131"><text:span text:style-name="T134">DFS</text:span><text:span text:style-name="T130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10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10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10" loext:marker-style-name="T149"><text:span text:style-name="T148">B → Q</text:span><text:span text:style-name="T149"/></text:p>
          </table:table-cell>
          <table:table-cell table:style-name="表格36.B3" office:value-type="string">
            <text:p text:style-name="P10" loext:marker-style-name="T149"><text:span text:style-name="T148">D → S</text:span><text:span text:style-name="T149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10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10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10" loext:marker-style-name="T144"><text:span text:style-name="T141">O(V+E)</text:span><text:span text:style-name="T144"/></text:p>
          </table:table-cell>
          <table:table-cell table:style-name="表格36.B5" office:value-type="string">
            <text:p text:style-name="P10" loext:marker-style-name="T144"><text:span text:style-name="T141">O(V+E)</text:span><text:span text:style-name="T144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</table:table-row>
      </table:table>
      <text:p text:style-name="Standard"/>
      <text:h text:style-name="P34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"/>
      <text:h text:style-name="P37" text:outline-level="2" loext:marker-style-name="T12"><text:span text:style-name="T12">5-1 </text:span><text:span text:style-name="T13">什麼是拓樸排序？</text:span></text:h>
      <text:p text:style-name="P13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5-2 In-degree </text:span><text:span text:style-name="T13">圖解</text:span></text:h>
      <text:p text:style-name="P13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5-3 Kahn's Algorithm </text:span><text:span text:style-name="T13">逐步圖解</text:span></text:h>
      <text:p text:style-name="P13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40.A1" office:value-type="string">
            <text:p text:style-name="P3" loext:marker-style-name="T131"><text:span text:style-name="T130">動作</text:span><text:span text:style-name="T131"/></text:p>
          </table:table-cell>
          <table:table-cell table:style-name="表格40.A1" office:value-type="string">
            <text:p text:style-name="P10" loext:marker-style-name="T131"><text:span text:style-name="T130">各頂點 </text:span><text:span text:style-name="T134">in-degree</text:span></text:p>
          </table:table-cell>
          <table:table-cell table:style-name="表格40.A1" office:value-type="string">
            <text:p text:style-name="P10" loext:marker-style-name="T131"><text:span text:style-name="T134">Queue</text:span><text:span text:style-name="T131"/></text:p>
          </table:table-cell>
          <table:table-cell table:style-name="表格40.A1" office:value-type="string">
            <text:p text:style-name="P10" loext:marker-style-name="T131"><text:span text:style-name="T130">輸出</text:span><text:span text:style-name="T131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10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10" loext:marker-style-name="T142"><text:span text:style-name="T140">M S L P ML</text:span><text:span text:style-name="T142"/></text:p>
          </table:table-cell>
        </table:table-row>
      </table:table>
      <text:p text:style-name="P1"/>
      <text:h text:style-name="P37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"/>
      <text:h text:style-name="P37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36" text:outline-level="1" loext:marker-style-name="T4">六<text:span text:style-name="T3">、考試速查表（最終記憶版）</text:span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" loext:marker-style-name="T131"><text:span text:style-name="T130">主題</text:span><text:span text:style-name="T131"/></text:p>
          </table:table-cell>
          <table:table-cell table:style-name="表格53.A1" office:value-type="string">
            <text:p text:style-name="P10" loext:marker-style-name="T131"><text:span text:style-name="T130">關鍵字 </text:span><text:span text:style-name="T134">/ </text:span><text:span text:style-name="T130">公式</text:span></text:p>
          </table:table-cell>
          <table:table-cell table:style-name="表格53.A1" office:value-type="string">
            <text:p text:style-name="P3" loext:marker-style-name="T131"><text:span text:style-name="T130">補充說明</text:span><text:span text:style-name="T131"/></text:p>
          </table:table-cell>
        </table:table-row>
        <table:table-row table:style-name="表格53.1">
          <table:table-cell table:style-name="表格53.A2" office:value-type="string">
            <text:p text:style-name="P3" loext:marker-style-name="T9"><text:span text:style-name="T17">BFS</text:span><text:span text:style-name="T9"/></text:p>
          </table:table-cell>
          <table:table-cell table:style-name="表格53.A2" office:value-type="string">
            <text:p text:style-name="P10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10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10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10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10" loext:marker-style-name="T149"><text:span text:style-name="T148">in-degree=0 </text:span><text:span text:style-name="T150">先出</text:span></text:p>
          </table:table-cell>
          <table:table-cell table:style-name="表格53.C2" office:value-type="string">
            <text:p text:style-name="P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10" loext:marker-style-name="T136"><text:span text:style-name="T139">無法 </text:span><text:span text:style-name="T135">Topological Sort</text:span></text:p>
          </table:table-cell>
          <table:table-cell table:style-name="表格53.C3" office:value-type="string">
            <text:p text:style-name="P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10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10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10" loext:marker-style-name="T142"><text:span text:style-name="T143">每條邊只存一次</text:span><text:span text:style-name="T142"/></text:p>
          </table:table-cell>
          <table:table-cell table:style-name="表格53.C2" office:value-type="string">
            <text:p text:style-name="P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"/>
      <text:h text:style-name="P35" text:outline-level="1" loext:marker-style-name="T4">七<text:span text:style-name="T3">、常見申論題標準答案</text:span><text:span text:style-name="T4"/></text:h>
      <text:p text:style-name="P26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"/>
      <text:p text:style-name="P26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"/>
      <text:p text:style-name="P26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12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"/>
      <text:p text:style-name="P26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12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"><text:soft-page-break/></text:p>
      <text:p text:style-name="P11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7:21:17.662000000</dc:date>
    <meta:editing-cycles>142</meta:editing-cycles>
    <meta:editing-duration>PT16H19M22S</meta:editing-duration>
    <meta:generator>MODA_ODF_Application_Tools/3.8.4.2$Windows_X86_64 LibreOffice_project/4fb77107d5af14329e08085efe4fa19b5633383a</meta:generator>
    <meta:document-statistic meta:table-count="49" meta:image-count="0" meta:object-count="0" meta:page-count="19" meta:paragraph-count="703" meta:word-count="7151" meta:character-count="15583" meta:non-whitespace-character-count="11388"/>
    <meta:user-defined meta:name="AppVersion">15.0000</meta:user-defined>
  </office:meta>
</office:document-meta>
</file>