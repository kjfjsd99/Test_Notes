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Standard">
      <style:paragraph-properties fo:margin-top="2.54cm" fo:margin-bottom="0cm" style:contextual-spacing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8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1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14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6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7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2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2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c48062" style:font-name-asian="Arial3" style:font-size-asian="11pt" style:font-weight-asian="bold" style:font-name-complex="Arial3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35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3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40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c74411" style:font-size-asian="11pt" style:font-size-complex="11pt"/>
    </style:style>
    <style:style style:name="P4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42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43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44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9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51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2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53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1d0b855" style:font-name-asian="Courier New1" style:font-size-asian="10pt" style:font-name-complex="Courier New1" style:font-size-complex="10pt"/>
    </style:style>
    <style:style style:name="P54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5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5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60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61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62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63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64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65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66" style:family="paragraph" style:parent-style-name="Standard">
      <style:paragraph-properties fo:margin-top="0.141cm" fo:margin-bottom="0cm" style:contextual-spacing="false"/>
    </style:style>
    <style:style style:name="P67" style:family="paragraph" style:parent-style-name="Standard">
      <style:paragraph-properties fo:margin-top="0.282cm" fo:margin-bottom="0cm" style:contextual-spacing="false"/>
    </style:style>
    <style:style style:name="P68" style:family="paragraph" style:parent-style-name="Standard">
      <style:paragraph-properties fo:margin-top="0.141cm" fo:margin-bottom="0.141cm" style:contextual-spacing="false"/>
    </style:style>
    <style:style style:name="P69" style:family="paragraph" style:parent-style-name="Standard">
      <style:paragraph-properties fo:margin-top="0.212cm" fo:margin-bottom="0cm" style:contextual-spacing="false"/>
    </style:style>
    <style:style style:name="P7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2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74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5" style:family="paragraph" style:parent-style-name="Standard">
      <style:text-properties fo:color="#18ffff" loext:opacity="100%" style:font-name="Courier New" fo:font-size="10pt" fo:font-weight="bold" officeooo:paragraph-rsid="01bcc9d1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6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paragraph-properties fo:margin-top="0.071cm" fo:margin-bottom="0.071cm" style:contextual-spacing="false"/>
    </style:style>
    <style:style style:name="P78" style:family="paragraph" style:parent-style-name="Standard">
      <style:paragraph-properties fo:margin-top="0.035cm" fo:margin-bottom="0.035cm" style:contextual-spacing="false"/>
    </style:style>
    <style:style style:name="P79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83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84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85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86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8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8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92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93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94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95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96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9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98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99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0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101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03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104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105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8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0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1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2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3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4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5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6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7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118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119" style:family="paragraph" style:parent-style-name="Standard">
      <style:text-properties officeooo:paragraph-rsid="00927941"/>
    </style:style>
    <style:style style:name="P120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121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122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123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124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125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30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paragraph-properties fo:margin-top="0.106cm" fo:margin-bottom="0.106cm" style:contextual-spacing="false" fo:text-align="star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35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6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7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8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39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0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1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2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4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 fo:text-align="start" style:justify-single-word="false"/>
      <style:text-properties officeooo:paragraph-rsid="00927941"/>
    </style:style>
    <style:style style:name="P146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47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8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9" style:family="paragraph" style:parent-style-name="Standard">
      <style:text-properties fo:color="#76ff03" loext:opacity="100%" style:font-name="Arial" fo:font-size="10pt" fo:font-weight="bold" officeooo:paragraph-rsid="01dca61f" fo:background-color="#f50057" style:font-name-asian="Arial3" style:font-size-asian="10pt" style:font-weight-asian="bold" style:font-name-complex="Arial3" style:font-size-complex="10pt" style:font-weight-complex="bold"/>
    </style:style>
    <style:style style:name="P150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1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52" style:family="paragraph" style:parent-style-name="Standard">
      <style:text-properties fo:color="#ffea00" loext:opacity="100%" style:font-name="Arial" fo:font-size="10pt" fo:font-weight="bold" officeooo:paragraph-rsid="00927941" fo:background-color="#1a237e" style:font-name-asian="Arial3" style:font-size-asian="10pt" style:font-weight-asian="bold" style:font-name-complex="Arial3" style:font-size-complex="10pt" style:font-weight-complex="bold"/>
    </style:style>
    <style:style style:name="P153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54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55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56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57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58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59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60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61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62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63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64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65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66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67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68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9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70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71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font-weight="bold" fo:background-color="#c6ff00" loext:char-shading-value="0" style:font-weight-asian="bold" style:font-weight-complex="bold"/>
    </style:style>
    <style:style style:name="T5" style:family="text">
      <style:text-properties fo:font-weight="bold" fo:background-color="#ff4081" loext:char-shading-value="0" style:font-weight-asian="bold" style:font-weight-complex="bold"/>
    </style:style>
    <style:style style:name="T6" style:family="text">
      <style:text-properties fo:font-weight="bold" fo:background-color="#64ffda" loext:char-shading-value="0" style:font-weight-asian="bold" style:font-weight-complex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fo:font-weight="bold" fo:background-color="#ff5252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4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5" style:family="text">
      <style:text-properties fo:color="#76ff03" loext:opacity="100%" fo:background-color="#f50057" loext:char-shading-value="0"/>
    </style:style>
    <style:style style:name="T16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17" style:family="text">
      <style:text-properties fo:color="#76ff03" loext:opacity="100%" fo:background-color="#1b5e20" loext:char-shading-value="0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2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3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24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25" style:family="text">
      <style:text-properties fo:color="#18ffff" loext:opacity="100%" fo:background-color="#d500f9" loext:char-shading-value="0"/>
    </style:style>
    <style:style style:name="T26" style:family="text">
      <style:text-properties fo:color="#18ffff" loext:opacity="100%" fo:font-size="13pt" fo:font-weight="bold" fo:background-color="#1a237e" loext:char-shading-value="0" style:font-size-asian="13pt" style:font-weight-asian="bold" style:font-size-complex="13pt" style:font-weight-complex="bold"/>
    </style:style>
    <style:style style:name="T27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9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0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31" style:family="text">
      <style:text-properties fo:color="#1a1a1a" loext:opacity="100%" fo:font-size="11pt" style:font-size-asian="11pt" style:font-size-complex="11pt"/>
    </style:style>
    <style:style style:name="T32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33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35" style:family="text">
      <style:text-properties fo:color="#1a1a1a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36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8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9" style:family="text">
      <style:text-properties fo:color="#ff3d00" loext:opacity="100%" fo:background-color="#64ffda" loext:char-shading-value="0"/>
    </style:style>
    <style:style style:name="T40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1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3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44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8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49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0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51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c6ff00" loext:opacity="100%" fo:background-color="#f50057" loext:char-shading-value="0"/>
    </style:style>
    <style:style style:name="T53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54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5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57" style:family="text">
      <style:text-properties fo:color="#ffff00" loext:opacity="100%"/>
    </style:style>
    <style:style style:name="T58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59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6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6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64" style:family="text">
      <style:text-properties fo:background-color="#ffff00" loext:char-shading-value="0"/>
    </style:style>
    <style:style style:name="T65" style:family="text">
      <style:text-properties fo:color="#ffea00" loext:opacity="100%" fo:background-color="#311b92" loext:char-shading-value="0"/>
    </style:style>
    <style:style style:name="T66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68" style:family="text">
      <style:text-properties fo:background-color="#ffd740" loext:char-shading-value="0"/>
    </style:style>
    <style:style style:name="T69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70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71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72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73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74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75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76" style:family="text">
      <style:text-properties fo:color="#555555" loext:opacity="100%" fo:background-color="#64ffda" loext:char-shading-value="0"/>
    </style:style>
    <style:style style:name="T77" style:family="text">
      <style:text-properties fo:color="#555555" loext:opacity="100%" fo:background-color="#ffff00" loext:char-shading-value="0"/>
    </style:style>
    <style:style style:name="T78" style:family="text">
      <style:text-properties fo:color="#555555" loext:opacity="100%" fo:background-color="#18ffff" loext:char-shading-value="0"/>
    </style:style>
    <style:style style:name="T79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80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81" style:family="text">
      <style:text-properties fo:color="#000000" loext:opacity="100%" fo:background-color="#ffd740" loext:char-shading-value="0"/>
    </style:style>
    <style:style style:name="T82" style:family="text">
      <style:text-properties fo:color="#000000" loext:opacity="100%" fo:background-color="#ffff00" loext:char-shading-value="0"/>
    </style:style>
    <style:style style:name="T83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84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85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86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87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88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89" style:family="text">
      <style:text-properties fo:background-color="#ffab40" loext:char-shading-value="0"/>
    </style:style>
    <style:style style:name="T90" style:family="text">
      <style:text-properties fo:background-color="#ffc400" loext:char-shading-value="0"/>
    </style:style>
    <style:style style:name="T91" style:family="text">
      <style:text-properties fo:color="#e040fb" loext:opacity="100%" fo:background-color="#4a148c" loext:char-shading-value="0"/>
    </style:style>
    <style:style style:name="T92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93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94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95" style:family="text">
      <style:text-properties fo:color="#1e8449" loext:opacity="100%" fo:font-size="11pt" fo:background-color="#76ff03" loext:char-shading-value="0" style:font-size-asian="11pt" style:font-size-complex="11pt"/>
    </style:style>
    <style:style style:name="T96" style:family="text">
      <style:text-properties fo:background-color="#18ffff" loext:char-shading-value="0"/>
    </style:style>
    <style:style style:name="T97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98" style:family="text">
      <style:text-properties fo:background-color="#eeff41" loext:char-shading-value="0"/>
    </style:style>
    <style:style style:name="T99" style:family="text">
      <style:text-properties fo:color="#ffcdd2" loext:opacity="100%" fo:background-color="#b71c1c" loext:char-shading-value="0"/>
    </style:style>
    <style:style style:name="T100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01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02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3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104" style:family="text">
      <style:text-properties fo:background-color="#64ffda" loext:char-shading-value="0"/>
    </style:style>
    <style:style style:name="T105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06" style:family="text">
      <style:text-properties fo:background-color="#76ff03" loext:char-shading-value="0"/>
    </style:style>
    <style:style style:name="T107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08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109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110" style:family="text">
      <style:text-properties fo:background-color="#1b5e20" loext:char-shading-value="0"/>
    </style:style>
    <style:style style:name="T111" style:family="text">
      <style:text-properties fo:background-color="#1b5e2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B-Tree + 2-3 Tree + 2-3-4 Tree</text:p>
      <text:p text:style-name="P9">Red-Black Tree 完整對照筆記</text:p>
      <text:p text:style-name="P13">公職考試｜資料結構專用</text:p>
      <text:p text:style-name="P14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本筆記涵蓋考點</text:p>
            <text:p text:style-name="P16">111地Q3 <text:s/>· <text:s/>112高Q4 <text:s/>· <text:s/>113地Q4 <text:s/>· <text:s/>114高Q1</text:p>
            <text:p text:style-name="P2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7" text:outline-level="1">第一章　為什麼需要這些樹？BST 的問題</text:h>
      <text:h text:style-name="P18" text:outline-level="2">1.1 普通 BST 的致命缺陷</text:h>
      <text:p text:style-name="P34"><text:span text:style-name="T2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5"><text:s text:c="2"/>10</text:p>
            <text:p text:style-name="P45"><text:s text:c="4"/>\</text:p>
            <text:p text:style-name="P45"><text:s text:c="5"/>20</text:p>
            <text:p text:style-name="P45"><text:s text:c="7"/>\</text:p>
            <text:p text:style-name="P45"><text:s text:c="8"/>30</text:p>
            <text:p text:style-name="P45"><text:s text:c="10"/>\</text:p>
            <text:p text:style-name="P45"><text:s text:c="11"/>40</text:p>
            <text:p text:style-name="P45"><text:s text:c="13"/>\</text:p>
            <text:p text:style-name="P45"><text:s text:c="14"/>50</text:p>
          </table:table-cell>
        </table:table-row>
      </table:table>
      <text:p text:style-name="P34">這種情況稱為「<text:span text:style-name="T9">退化樹（Degenerate Tree）</text:span>」，搜尋時間複雜度退化為 O(n)，與 Linked List 無異。</text:p>
      <text:p text:style-name="P66"><text:s/></text:p>
      <text:h text:style-name="P18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3">樹的種類</text:p>
          </table:table-cell>
          <table:table-cell table:style-name="表格3.A1" office:value-type="string">
            <text:p text:style-name="P23">維持平衡的方式</text:p>
          </table:table-cell>
          <table:table-cell table:style-name="表格3.A1" office:value-type="string">
            <text:p text:style-name="P23">搜尋效率</text:p>
          </table:table-cell>
          <table:table-cell table:style-name="表格3.A1" office:value-type="string">
            <text:p text:style-name="P23">實務應用</text:p>
          </table:table-cell>
        </table:table-row>
        <table:table-row table:style-name="表格3.1">
          <table:table-cell table:style-name="表格3.A2" office:value-type="string">
            <text:p text:style-name="P46">BST</text:p>
          </table:table-cell>
          <table:table-cell table:style-name="表格3.A2" office:value-type="string">
            <text:p text:style-name="P46">不自動平衡</text:p>
          </table:table-cell>
          <table:table-cell table:style-name="表格3.A2" office:value-type="string">
            <text:p text:style-name="P46"><text:span text:style-name="T2">O(n)</text:span> <text:span text:style-name="T18">最壞</text:span></text:p>
          </table:table-cell>
          <table:table-cell table:style-name="表格3.A2" office:value-type="string">
            <text:p text:style-name="P46">基礎概念</text:p>
          </table:table-cell>
        </table:table-row>
        <table:table-row table:style-name="表格3.1">
          <table:table-cell table:style-name="表格3.A3" office:value-type="string">
            <text:p text:style-name="P46">AVL Tree</text:p>
          </table:table-cell>
          <table:table-cell table:style-name="表格3.A3" office:value-type="string">
            <text:p text:style-name="P46">旋轉 (LL/RR/LR/RL)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教學用途</text:p>
          </table:table-cell>
        </table:table-row>
        <table:table-row table:style-name="表格3.1">
          <table:table-cell table:style-name="表格3.A2" office:value-type="string">
            <text:p text:style-name="P46">2-3 Tree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B-Tree 基礎</text:p>
          </table:table-cell>
        </table:table-row>
        <table:table-row table:style-name="表格3.1">
          <table:table-cell table:style-name="表格3.A3" office:value-type="string">
            <text:p text:style-name="P46">2-3-4 Tree</text:p>
          </table:table-cell>
          <table:table-cell table:style-name="表格3.A3" office:value-type="string">
            <text:p text:style-name="P46">Split / Borrow / Merge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= B-Tree order 4</text:p>
          </table:table-cell>
        </table:table-row>
        <table:table-row table:style-name="表格3.1">
          <table:table-cell table:style-name="表格3.A2" office:value-type="string">
            <text:p text:style-name="P46">B-Tree (order m)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資料庫索引</text:p>
          </table:table-cell>
        </table:table-row>
        <table:table-row table:style-name="表格3.1">
          <table:table-cell table:style-name="表格3.A3" office:value-type="string">
            <text:p text:style-name="P46">Red-Black Tree</text:p>
          </table:table-cell>
          <table:table-cell table:style-name="表格3.A3" office:value-type="string">
            <text:p text:style-name="P46">顏色標記 + 旋轉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Linux Kernel, Java, C++</text:p>
          </table:table-cell>
        </table:table-row>
      </table:table>
      <text:p text:style-name="P67"><text:s/></text:p>
      <text:p text:style-name="P68"><text:span text:style-name="T27">核心記憶句：</text:span><text:span text:style-name="T31">AVL 靠「旋轉」維持平衡；2-3 Tree / B-Tree 靠「分裂(Split)與合併(Merge)」維持平衡。這一句幾乎就是整章樹狀結構的核心。</text:span></text:p>
      <text:p text:style-name="Standard"/>
      <text:h text:style-name="P17" text:outline-level="1">第二章　m-way 搜尋樹定義</text:h>
      <text:h text:style-name="P18" text:outline-level="2">2.1 基本概念</text:h>
      <text:p text:style-name="P34"><text:span text:style-name="T2">普通 BST </text:span>是<text:span text:style-name="T37"> 2-way</text:span> 搜尋樹（<text:span text:style-name="T41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23">樹的類型</text:p>
          </table:table-cell>
          <table:table-cell table:style-name="表格4.A1" office:value-type="string">
            <text:p text:style-name="P23">每節點最多 children</text:p>
          </table:table-cell>
          <table:table-cell table:style-name="表格4.A1" office:value-type="string">
            <text:p text:style-name="P23">每節點最多 key</text:p>
          </table:table-cell>
        </table:table-row>
        <table:table-row table:style-name="表格4.1">
          <table:table-cell table:style-name="表格4.A2" office:value-type="string">
            <text:p text:style-name="P46">BST（2-way）</text:p>
          </table:table-cell>
          <table:table-cell table:style-name="表格4.A2" office:value-type="string">
            <text:p text:style-name="P46">2 個</text:p>
          </table:table-cell>
          <table:table-cell table:style-name="表格4.A2" office:value-type="string">
            <text:p text:style-name="P46">1 個</text:p>
          </table:table-cell>
        </table:table-row>
        <table:table-row table:style-name="表格4.1">
          <table:table-cell table:style-name="表格4.A3" office:value-type="string">
            <text:p text:style-name="P46">2-3 Tree</text:p>
          </table:table-cell>
          <table:table-cell table:style-name="表格4.A3" office:value-type="string">
            <text:p text:style-name="P46">3 個</text:p>
          </table:table-cell>
          <table:table-cell table:style-name="表格4.A3" office:value-type="string">
            <text:p text:style-name="P46">2 個</text:p>
          </table:table-cell>
        </table:table-row>
        <table:table-row table:style-name="表格4.1">
          <table:table-cell table:style-name="表格4.A2" office:value-type="string">
            <text:p text:style-name="P46">2-3-4 Tree</text:p>
          </table:table-cell>
          <table:table-cell table:style-name="表格4.A2" office:value-type="string">
            <text:p text:style-name="P46">4 個</text:p>
          </table:table-cell>
          <table:table-cell table:style-name="表格4.A2" office:value-type="string">
            <text:p text:style-name="P46">3 個</text:p>
          </table:table-cell>
        </table:table-row>
        <table:table-row table:style-name="表格4.1">
          <table:table-cell table:style-name="表格4.A3" office:value-type="string">
            <text:p text:style-name="P46">B-Tree (order m)</text:p>
          </table:table-cell>
          <table:table-cell table:style-name="表格4.A3" office:value-type="string">
            <text:p text:style-name="P46">m 個</text:p>
          </table:table-cell>
          <table:table-cell table:style-name="表格4.A3" office:value-type="string">
            <text:p text:style-name="P46">m-1 個</text:p>
          </table:table-cell>
        </table:table-row>
      </table:table>
      <text:p text:style-name="P69"><text:s/></text:p>
      <text:h text:style-name="P18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9">核心公式（整章只需記這一句）</text:p>
            <text:p text:style-name="P70">children = key + 1</text:p>
            <text:p text:style-name="P77"/>
            <text:p text:style-name="P35">因為<text:span text:style-name="T10">一個 key </text:span>會把空間切成<text:span text:style-name="T10">左右兩塊</text:span>；<text:span text:style-name="T10">兩個 key 切三塊</text:span>；以此類推。</text:p>
          </table:table-cell>
        </table:table-row>
      </table:table>
      <text:p text:style-name="P66"><text:s/></text:p>
      <text:p text:style-name="P34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5">1 個 key： <text:s/>[50]</text:p>
            <text:p text:style-name="P45"><text:s text:c="14"/>↓</text:p>
            <text:p text:style-name="P45"><text:s text:c="10"/>&lt;50 <text:s text:c="3"/>&gt;50</text:p>
            <text:p text:style-name="P45"><text:s text:c="10"/>(左) <text:s text:c="2"/>(右) <text:s text:c="2"/>→ 2 個出口 = 2 個 children</text:p>
            <text:p text:style-name="P78"/>
            <text:p text:style-name="P45">2 個 key： <text:s/>[20 | 50]</text:p>
            <text:p text:style-name="P45"><text:s text:c="17"/>↓</text:p>
            <text:p text:style-name="P45"><text:s text:c="7"/>&lt;20 <text:s text:c="2"/>20~50 <text:s text:c="2"/>&gt;50</text:p>
            <text:p text:style-name="P45"><text:s text:c="7"/>(左) <text:s text:c="2"/>(中) <text:s text:c="2"/>(右) <text:s/>→ 3 個出口 = 3 個 children</text:p>
            <text:p text:style-name="P78"/>
            <text:p text:style-name="P45">3 個 key： <text:s/>[20 | 50 | 80]</text:p>
            <text:p text:style-name="P45"><text:s text:c="20"/>↓</text:p>
            <text:p text:style-name="P45"><text:s text:c="3"/>&lt;20 <text:s/>20~50 <text:s/>50~80 <text:s/>&gt;80</text:p>
            <text:p text:style-name="P45"><text:s text:c="3"/>(1) <text:s text:c="2"/>(2) <text:s text:c="2"/>(3) <text:s text:c="2"/>(4) <text:s/>→ 4 個出口 = 4 個 children</text:p>
          </table:table-cell>
        </table:table-row>
      </table:table>
      <text:p text:style-name="P66"><text:s/></text:p>
      <text:p text:style-name="P34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23">樹的名稱</text:p>
          </table:table-cell>
          <table:table-cell table:style-name="表格7.A1" office:value-type="string">
            <text:p text:style-name="P23">直覺理解</text:p>
          </table:table-cell>
          <table:table-cell table:style-name="表格7.A1" office:value-type="string">
            <text:p text:style-name="P23">children（出口數）</text:p>
          </table:table-cell>
          <table:table-cell table:style-name="表格7.A1" office:value-type="string">
            <text:p text:style-name="P23">key（格子數）</text:p>
          </table:table-cell>
        </table:table-row>
        <table:table-row table:style-name="表格7.1">
          <table:table-cell table:style-name="表格7.A2" office:value-type="string">
            <text:p text:style-name="P46">BST</text:p>
          </table:table-cell>
          <table:table-cell table:style-name="表格7.A2" office:value-type="string">
            <text:p text:style-name="P46">最多 2 個出口</text:p>
          </table:table-cell>
          <table:table-cell table:style-name="表格7.A2" office:value-type="string">
            <text:p text:style-name="P46">2</text:p>
          </table:table-cell>
          <table:table-cell table:style-name="表格7.A2" office:value-type="string">
            <text:p text:style-name="P46">1</text:p>
          </table:table-cell>
        </table:table-row>
        <table:table-row table:style-name="表格7.1">
          <table:table-cell table:style-name="表格7.A3" office:value-type="string">
            <text:p text:style-name="P46">2-3 Tree</text:p>
          </table:table-cell>
          <table:table-cell table:style-name="表格7.A3" office:value-type="string">
            <text:p text:style-name="P46">最多 3 個出口</text:p>
          </table:table-cell>
          <table:table-cell table:style-name="表格7.A3" office:value-type="string">
            <text:p text:style-name="P46">3</text:p>
          </table:table-cell>
          <table:table-cell table:style-name="表格7.A3" office:value-type="string">
            <text:p text:style-name="P46">2</text:p>
          </table:table-cell>
        </table:table-row>
        <table:table-row table:style-name="表格7.1">
          <table:table-cell table:style-name="表格7.A2" office:value-type="string">
            <text:p text:style-name="P46">2-3-4 Tree</text:p>
          </table:table-cell>
          <table:table-cell table:style-name="表格7.A2" office:value-type="string">
            <text:p text:style-name="P46">最多 4 個出口</text:p>
          </table:table-cell>
          <table:table-cell table:style-name="表格7.A2" office:value-type="string">
            <text:p text:style-name="P46">4</text:p>
          </table:table-cell>
          <table:table-cell table:style-name="表格7.A2" office:value-type="string">
            <text:p text:style-name="P46">3</text:p>
          </table:table-cell>
        </table:table-row>
        <table:table-row table:style-name="表格7.1">
          <table:table-cell table:style-name="表格7.A3" office:value-type="string">
            <text:p text:style-name="P46">B-Tree (order m)</text:p>
          </table:table-cell>
          <table:table-cell table:style-name="表格7.A3" office:value-type="string">
            <text:p text:style-name="P46">最多 m 個出口</text:p>
          </table:table-cell>
          <table:table-cell table:style-name="表格7.A3" office:value-type="string">
            <text:p text:style-name="P46">m</text:p>
          </table:table-cell>
          <table:table-cell table:style-name="表格7.A3" office:value-type="string">
            <text:p text:style-name="P46">m-1</text:p>
          </table:table-cell>
        </table:table-row>
      </table:table>
      <text:p text:style-name="P66"><text:soft-page-break/><text:s/></text:p>
      <text:p text:style-name="P68"><text:span text:style-name="T44">m-way 的白話翻譯：</text:span><text:span text:style-name="T31"> 老師說『m-way search tree』，腦袋直接換成『最多 m 個出口的搜尋樹』就好，完全不需要記新名詞。</text:span></text:p>
      <text:p text:style-name="P66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79">考試暴力記憶法（只背這三行，其餘全部可以推導）</text:p>
            <text:p text:style-name="P35">2-3 Tree <text:s text:c="2"/>→ 3 個出口 → 最多 2 個 key</text:p>
            <text:p text:style-name="P35">2-3-4 Tree → 4 個出口 → 最多 3 個 key</text:p>
            <text:p text:style-name="P35">B-Tree order m → m 個出口 → 最多 m-1 個 key</text:p>
            <text:p text:style-name="P77"/>
            <text:p text:style-name="P35">其他名詞（m-way、degree、order）全部都是這三行的不同說法而已。</text:p>
          </table:table-cell>
        </table:table-row>
      </table:table>
      <text:p text:style-name="P69"><text:s/></text:p>
      <text:h text:style-name="P18" text:outline-level="2">2.3 節點結構說明</text:h>
      <text:p text:style-name="P34">一個<text:span text:style-name="T3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5">節點有：最多 <text:span text:style-name="T2">m-1</text:span> 個<text:span text:style-name="T18">資料（key）</text:span></text:p>
            <text:p text:style-name="P45"><text:s text:c="7"/>最多 <text:span text:style-name="T2">m</text:span> <text:s text:c="2"/>個<text:span text:style-name="T45">子樹（children）</text:span></text:p>
            <text:p text:style-name="P78"/>
            <text:p text:style-name="P45">關係式：<text:span text:style-name="T49">children 數 = key 數 + 1</text:span></text:p>
            <text:p text:style-name="P78"/>
            <text:p text:style-name="P45">例如 m=4：</text:p>
            <text:p text:style-name="P45"><text:s text:c="2"/>[20 | 50 | 80] <text:s text:c="3"/>← <text:span text:style-name="T2">3 個 key</text:span></text:p>
            <text:p text:style-name="P45"><text:s text:c="2"/>/ <text:s text:c="2"/>| <text:s text:c="3"/>| <text:s text:c="2"/>\ <text:s text:c="2"/>← <text:span text:style-name="T2">4 個 children</text:span></text:p>
            <text:p text:style-name="P45"><text:s/>c1 <text:s text:c="2"/>c2 <text:s text:c="2"/>c3 <text:s text:c="2"/>c4</text:p>
          </table:table-cell>
        </table:table-row>
      </table:table>
      <text:p text:style-name="P66"><text:s/></text:p>
      <text:h text:style-name="P19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0">⚠️ 考試重要度提示</text:p>
            <text:p text:style-name="P36">這一節在公職考試的重要度約 10 分，B-Tree 插入刪除才是 90 分的重點。</text:p>
            <text:p text:style-name="P36">看不懂不用恐慌，只需記最後兩行公式即可。</text:p>
          </table:table-cell>
        </table:table-row>
      </table:table>
      <text:p text:style-name="P83"><text:s/></text:p>
      <text:p text:style-name="P84"><text:span text:style-name="T55">概念：</text:span><text:span text:style-name="T31">樹狀結構通常需要 pointer（指標）才能連結節點。但</text:span><text:span text:style-name="T58">陣列表示法完全不用 pointer</text:span><text:span text:style-name="T31">，</text:span><text:span text:style-name="T38">靠「位置計算」就能找到任何子節點</text:span><text:span text:style-name="T31">，原理跟 Binary Heap 一模一樣。</text:span></text:p>
      <text:p text:style-name="P83"><text:s/></text:p>
      <text:h text:style-name="P4" text:outline-level="3">第一步：先從你熟悉的 Binary Heap 理解</text:h>
      <text:p text:style-name="P37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7"><text:s text:c="8"/>10</text:p>
            <text:p text:style-name="P47"><text:s text:c="7"/>/ <text:s/>\</text:p>
            <text:p text:style-name="P47"><text:s text:c="5"/>20 <text:s text:c="3"/>30</text:p>
            <text:p text:style-name="P85"/>
            <text:p text:style-name="P47"><text:s text:c="2"/>a[1]=10 <text:s/>（root）</text:p>
            <text:p text:style-name="P47"><text:s text:c="2"/>a[2]=20 <text:s/>（左孩子）</text:p>
            <text:p text:style-name="P85"><text:soft-page-break/><text:span text:style-name="T34"><text:s text:c="2"/>a[3]=30 <text:s/>（右孩子）</text:span></text:p>
            <text:p text:style-name="P85"/>
            <text:p text:style-name="P47"><text:s text:c="2"/><text:span text:style-name="T18">父節點在 a[i]</text:span> <text:s/>→ <text:span text:style-name="T60"><text:s/>左孩子 a[2i]，右孩子 a[2i+1]</text:span></text:p>
            <text:p text:style-name="P47"><text:s text:c="2"/>（<text:span text:style-name="T41">0-indexed 版本：左孩子 a[2i+1]，右孩子 a[2i+2]</text:span>）</text:p>
          </table:table-cell>
        </table:table-row>
      </table:table>
      <text:p text:style-name="P83"><text:s/></text:p>
      <text:h text:style-name="P4" text:outline-level="3">第二步：m-way Tree 只是把 2 換成 m</text:h>
      <text:p text:style-name="P37"><text:span text:style-name="T61">BST 每個節點最多 2 個孩子，所以用 2×i</text:span>。<text:span text:style-name="T49">m-way Tree 每個節點最多 m 個孩子</text:span>，所以改成<text:span text:style-name="T37"> m×i</text:span>，再加上<text:span text:style-name="T37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7">公式：<text:span text:style-name="T3">第 c 個孩子 </text:span><text:s/>→ <text:s/><text:span text:style-name="T18">a[m×i + c]</text:span></text:p>
            <text:p text:style-name="P85"/>
            <text:p text:style-name="P47"><text:s text:c="2"/><text:span text:style-name="T3">i</text:span> = <text:span text:style-name="T62">該節點在陣列中的 index</text:span></text:p>
            <text:p text:style-name="P47"><text:s text:c="2"/><text:span text:style-name="T3">c</text:span> = <text:span text:style-name="T37">第幾個孩子</text:span>（從 1 開始數）</text:p>
            <text:p text:style-name="P47"><text:s text:c="2"/><text:span text:style-name="T3">m</text:span> = <text:span text:style-name="T49">這棵樹的 order</text:span>（2-3 Tree 就代 m=3，BST 就代 m=2）</text:p>
            <text:p text:style-name="P85"/>
            <text:p text:style-name="P47">代入 <text:span text:style-name="T64">m=2</text:span>（BST）：</text:p>
            <text:p text:style-name="P47"><text:s text:c="2"/><text:span text:style-name="T37">第 1 孩子</text:span> → a[<text:span text:style-name="T64">2</text:span>×i+<text:span text:style-name="T37">1</text:span>] <text:s/>← 和 Heap 的左孩子完全一樣！</text:p>
            <text:p text:style-name="P47"><text:s text:c="2"/><text:span text:style-name="T37">第 2 孩子</text:span> → a[<text:span text:style-name="T64">2</text:span>×i+<text:span text:style-name="T37">2]</text:span> <text:s/>← 和 Heap 的右孩子完全一樣！</text:p>
          </table:table-cell>
        </table:table-row>
      </table:table>
      <text:p text:style-name="P83"><text:s/></text:p>
      <text:h text:style-name="P4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7">範例 A：2-3 Tree（<text:span text:style-name="T64">m=3</text:span>），節點在 a[<text:span text:style-name="T4">2</text:span>]</text:p>
            <text:p text:style-name="P47"><text:s text:c="2"/><text:span text:style-name="T37">第 1 孩子</text:span> → a[<text:span text:style-name="T64">3</text:span>×<text:span text:style-name="T4">2</text:span>+<text:span text:style-name="T37">1</text:span>] = a[7]</text:p>
            <text:p text:style-name="P47"><text:s text:c="2"/><text:span text:style-name="T37">第 2 孩子</text:span> → a[<text:span text:style-name="T64">3</text:span>×<text:span text:style-name="T4">2</text:span>+<text:span text:style-name="T37">2</text:span>] = a[8]</text:p>
            <text:p text:style-name="P47"><text:s text:c="2"/><text:span text:style-name="T37">第 3 孩子</text:span> → a[<text:span text:style-name="T64">3</text:span>×<text:span text:style-name="T4">2</text:span>+<text:span text:style-name="T37">3</text:span>] = a[9]</text:p>
            <text:p text:style-name="P85"/>
            <text:p text:style-name="P47">範例 B（考試常考型）：m=4，節點在 a[3]，第 2 孩子在哪？</text:p>
            <text:p text:style-name="P47"><text:s text:c="2"/>a[4×3+2] = a[14] <text:s text:c="2"/>← 答案就是 a[14]</text:p>
          </table:table-cell>
        </table:table-row>
      </table:table>
      <text:p text:style-name="P83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0">只需記這兩行，其餘全部推導</text:p>
            <text:p text:style-name="P36">root = a[0]</text:p>
            <text:p text:style-name="P36"><text:span text:style-name="T2">第 c 個孩子</text:span> =<text:span text:style-name="T18"> a[m×i + c]</text:span></text:p>
          </table:table-cell>
        </table:table-row>
      </table:table>
      <text:h text:style-name="P86" text:outline-level="2">2.5 搜尋順序規則</text:h>
      <text:p text:style-name="P34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5"><text:s text:c="8"/>[30 | 60]</text:p>
            <text:p text:style-name="P45"><text:s text:c="7"/>/ <text:s text:c="3"/>| <text:s text:c="3"/>\</text:p>
            <text:p text:style-name="P45"><text:s text:c="6"/>/ <text:s text:c="4"/>| <text:s text:c="4"/>\</text:p>
            <text:p text:style-name="P45"><text:s/>(&lt;30) <text:s/>(30~60) <text:s/>(&gt;60)</text:p>
            <text:p text:style-name="P78"/>
            <text:p text:style-name="P45">左子樹：所有值 &lt; 30</text:p>
            <text:p text:style-name="P45">中子樹：30 &lt; 值 &lt; 60</text:p>
            <text:p text:style-name="P45">右子樹：所有值 &gt; 60</text:p>
          </table:table-cell>
        </table:table-row>
      </table:table>
      <text:p text:style-name="Standard"/>
      <text:h text:style-name="P17" text:outline-level="1">第三章　B-Tree 完整定義與重要公式</text:h>
      <text:h text:style-name="P18" text:outline-level="2">3.1 什麼是 B-Tree？</text:h>
      <text:p text:style-name="P34">B-Tree 是一種多路平衡搜尋樹，專為資料庫、檔案系統設計。<text:span text:style-name="T9">每個節點可存放多個 key</text:span>，使<text:span text:style-name="T60">樹的高度極低</text:span>，<text:span text:style-name="T2">大幅減少磁碟 I/O 次數</text:span>。</text:p>
      <text:p text:style-name="P66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71">為什麼資料庫要用 B-Tree？</text:p>
            <text:p text:style-name="P35"><text:span text:style-name="T18">資料庫資料存在硬碟</text:span>，每次存取需要磁碟 I/O（很慢）。</text:p>
            <text:p text:style-name="P35"><text:span text:style-name="T37">AVL Tree 每個節點只存 1 個 key → 高度高</text:span> → I/O 次數多。</text:p>
            <text:p text:style-name="P35"><text:span text:style-name="T49">B-Tree order 100 每個節點可存 99 個 key → 100 萬筆資料高度僅約 3</text:span>。</text:p>
            <text:p text:style-name="P35">高度 3 → 最多只需 3 次磁碟 I/O，效率極高。</text:p>
          </table:table-cell>
        </table:table-row>
      </table:table>
      <text:p text:style-name="P69"><text:s/></text:p>
      <text:h text:style-name="P18" text:outline-level="2">3.2 B-Tree order 的定義（超重要！）</text:h>
      <text:p text:style-name="P68"><text:span text:style-name="T28">B-Tree order m</text:span><text:span text:style-name="T32"> </text:span><text:span text:style-name="T31">的意思是：</text:span><text:span text:style-name="T22">每個節點「最多有 m 個 children」</text:span><text:span text:style-name="T31">（</text:span><text:span text:style-name="T59">不是 m 個 key！</text:span><text:span text:style-name="T31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7">order = m <text:s/>→ <text:s/>最大 children 數 = m <text:s/>→ <text:s/>最大 key 數 = m-1</text:p>
            <text:p text:style-name="P78"/>
            <text:p text:style-name="P45">常見對照：</text:p>
            <text:p text:style-name="P45"><text:s text:c="2"/>order = <text:span text:style-name="T3">3</text:span> <text:s/>→ <text:s/>2-<text:span text:style-name="T3">3</text:span> Tree <text:s text:c="5"/>（最多 2 key，最多 <text:span text:style-name="T3">3 children</text:span>）</text:p>
            <text:p text:style-name="P45"><text:s text:c="2"/>order = <text:span text:style-name="T3">4</text:span> <text:s/>→ <text:s/>2-3-<text:span text:style-name="T3">4</text:span> Tree <text:s text:c="2"/>（最多 3 key，最多 <text:span text:style-name="T3">4 children</text:span>）</text:p>
            <text:p text:style-name="P45"><text:s text:c="2"/>order = <text:span text:style-name="T3">5</text:span> <text:s/>→ <text:s/>每節點最多 4 key，最多 <text:span text:style-name="T3">5 children</text:span></text:p>
          </table:table-cell>
        </table:table-row>
      </table:table>
      <text:p text:style-name="P66"><text:s/></text:p>
      <text:h text:style-name="P18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23">性質</text:p>
          </table:table-cell>
          <table:table-cell table:style-name="表格14.A1" office:value-type="string">
            <text:p text:style-name="P23">公式／說明</text:p>
          </table:table-cell>
        </table:table-row>
        <table:table-row table:style-name="表格14.1">
          <table:table-cell table:style-name="表格14.A2" office:value-type="string">
            <text:p text:style-name="P58">每節點最多 key 數</text:p>
          </table:table-cell>
          <table:table-cell table:style-name="表格14.A2" office:value-type="string">
            <text:p text:style-name="P59">m - 1</text:p>
          </table:table-cell>
        </table:table-row>
        <table:table-row table:style-name="表格14.1">
          <table:table-cell table:style-name="表格14.A3" office:value-type="string">
            <text:p text:style-name="P46">根節點最少 key 數</text:p>
          </table:table-cell>
          <table:table-cell table:style-name="表格14.A3" office:value-type="string">
            <text:p text:style-name="P46">1（至少有 1 個 key）</text:p>
          </table:table-cell>
        </table:table-row>
        <table:table-row table:style-name="表格14.1">
          <table:table-cell table:style-name="表格14.A2" office:value-type="string">
            <text:p text:style-name="P58"><text:span text:style-name="T12">非根節點</text:span>最少 key 數</text:p>
          </table:table-cell>
          <table:table-cell table:style-name="表格14.A2" office:value-type="string">
            <text:p text:style-name="P74">⌈m/2⌉ - 1 <text:s text:c="6"/><text:span text:style-name="T65">(⌈ ⌉ 叫做 ceiling)</text:span></text:p>
          </table:table-cell>
        </table:table-row>
        <table:table-row table:style-name="表格14.1">
          <table:table-cell table:style-name="表格14.A3" office:value-type="string">
            <text:p text:style-name="P58"><text:span text:style-name="T12">非根節點</text:span>最少 children 數</text:p>
          </table:table-cell>
          <table:table-cell table:style-name="表格14.A3" office:value-type="string">
            <text:p text:style-name="P75">⌈m/2⌉ <text:s text:c="10"/><text:span text:style-name="T65">(⌈ ⌉ 叫做 ceiling)</text:span></text:p>
          </table:table-cell>
        </table:table-row>
        <table:table-row table:style-name="表格14.1">
          <table:table-cell table:style-name="表格14.A2" office:value-type="string">
            <text:p text:style-name="P46">所有葉節點高度</text:p>
          </table:table-cell>
          <table:table-cell table:style-name="表格14.A2" office:value-type="string">
            <text:p text:style-name="P46">相同（嚴格平衡）</text:p>
          </table:table-cell>
        </table:table-row>
        <table:table-row table:style-name="表格14.1">
          <table:table-cell table:style-name="表格14.A3" office:value-type="string">
            <text:p text:style-name="P46">搜尋時間複雜度</text:p>
          </table:table-cell>
          <table:table-cell table:style-name="表格14.A3" office:value-type="string">
            <text:p text:style-name="P46">O(log n)</text:p>
          </table:table-cell>
        </table:table-row>
        <table:table-row table:style-name="表格14.1">
          <table:table-cell table:style-name="表格14.A2" office:value-type="string">
            <text:p text:style-name="P46">最大 key 數（高度 h）</text:p>
          </table:table-cell>
          <table:table-cell table:style-name="表格14.A2" office:value-type="string">
            <text:p text:style-name="P46">層層×(m-1)累計</text:p>
          </table:table-cell>
        </table:table-row>
      </table:table>
      <text:p text:style-name="P69"><text:s/></text:p>
      <text:h text:style-name="P18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5">公式：<text:span text:style-name="T3">非根節點</text:span><text:span text:style-name="T50">最少</text:span> <text:span text:style-name="T66">key = ⌈m/2⌉ - 1</text:span></text:p>
            <text:p text:style-name="P78"/>
            <text:p text:style-name="P45">範例 1：B-Tree order 5</text:p>
            <text:p text:style-name="P78"><text:soft-page-break/><text:span text:style-name="T34"><text:s text:c="2"/>⌈5/2⌉ - 1 = ⌈2.5⌉ - 1 = 3 - 1 = 2 <text:s/>→ <text:s/></text:span><text:span text:style-name="T35">每非根節點至少 2 個 key</text:span></text:p>
            <text:p text:style-name="P78"/>
            <text:p text:style-name="P45">範例 2：B-Tree order 4</text:p>
            <text:p text:style-name="P45"><text:s text:c="2"/>⌈4/2⌉ - 1 = ⌈2⌉ - 1 = 2 - 1 = 1 <text:s text:c="2"/>→ <text:s/><text:span text:style-name="T64">每非根節點至少 1 個 key</text:span></text:p>
            <text:p text:style-name="P78"/>
            <text:p text:style-name="P45">範例 3：B-Tree order 6</text:p>
            <text:p text:style-name="P45"><text:s text:c="2"/>⌈6/2⌉ - 1 = ⌈3⌉ - 1 = 3 - 1 = 2 <text:s text:c="2"/>→ <text:s/><text:span text:style-name="T64">每非根節點至少 2 個 key</text:span></text:p>
          </table:table-cell>
        </table:table-row>
      </table:table>
      <text:p text:style-name="P66"/>
      <text:h text:style-name="P20" text:outline-level="2">3.4.1 公式這樣來的：不用死背，推導就好</text:h>
      <text:p text:style-name="P91"><text:span text:style-name="T55">核心觀念：</text:span><text:span text:style-name="T33">B-Tree 規定</text:span><text:span text:style-name="T38">非根節點「至少要半滿」</text:span><text:span text:style-name="T31">。知道這句話，公式自然推出來。</text:span></text:p>
      <text:p text:style-name="P92"><text:s/></text:p>
      <text:p text:style-name="P10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8">Step 1：<text:span text:style-name="T18">最多幾個 children？</text:span></text:p>
            <text:p text:style-name="P48"><text:s text:c="8"/><text:span text:style-name="T5">order=5</text:span> <text:s/>→ <text:s/><text:span text:style-name="T64">最多 5 個 children</text:span></text:p>
            <text:p text:style-name="P93"/>
            <text:p text:style-name="P48">Step 2：<text:span text:style-name="T18">至少要半滿，算最少 children</text:span></text:p>
            <text:p text:style-name="P50"><text:s text:c="8"/>5 ÷ 2 = 2.5 <text:s/>→ <text:s/>不能有 2.5 個孩子 <text:s/>→ <text:s/><text:span text:style-name="T64">向上取整 2.5⌉ = 3</text:span></text:p>
            <text:p text:style-name="P48"><text:s text:c="8"/>所以<text:span text:style-name="T64">至少 3 個 children</text:span></text:p>
            <text:p text:style-name="P93"/>
            <text:p text:style-name="P48">Step 3：children 換算成 key（用那條熟悉的公式）</text:p>
            <text:p text:style-name="P48"><text:s text:c="8"/>key = children - 1 = 3 - 1 = 2</text:p>
            <text:p text:style-name="P48"><text:s text:c="8"/>∴ <text:span text:style-name="T64">非根節點至少 2 個 key</text:span> <text:s text:c="2"/>✅</text:p>
          </table:table-cell>
        </table:table-row>
      </table:table>
      <text:p text:style-name="P92"><text:s/></text:p>
      <text:p text:style-name="P38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89">order</text:p>
          </table:table-cell>
          <table:table-cell table:style-name="表格73.A1" office:value-type="string">
            <text:p text:style-name="P24"><text:span text:style-name="T52">最多</text:span> children</text:p>
          </table:table-cell>
          <table:table-cell table:style-name="表格73.A1" office:value-type="string">
            <text:p text:style-name="P25"><text:span text:style-name="T15">至少</text:span> children（半滿⌈m/2⌉，<text:span text:style-name="T39">非根節點「至少要半滿」</text:span>）</text:p>
          </table:table-cell>
          <table:table-cell table:style-name="表格73.A1" office:value-type="string">
            <text:p text:style-name="P24"><text:span text:style-name="T15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60">4</text:p>
          </table:table-cell>
          <table:table-cell table:style-name="表格73.A2" office:value-type="string">
            <text:p text:style-name="P49">4 個</text:p>
          </table:table-cell>
          <table:table-cell table:style-name="表格73.A2" office:value-type="string">
            <text:p text:style-name="P51">⌈4/2⌉ = 2 個</text:p>
          </table:table-cell>
          <table:table-cell table:style-name="表格73.A2" office:value-type="string">
            <text:p text:style-name="P49">2−1 = 1 個</text:p>
          </table:table-cell>
        </table:table-row>
        <table:table-row table:style-name="表格73.1">
          <table:table-cell table:style-name="表格73.A3" office:value-type="string">
            <text:p text:style-name="P60">5</text:p>
          </table:table-cell>
          <table:table-cell table:style-name="表格73.A3" office:value-type="string">
            <text:p text:style-name="P49">5 個</text:p>
          </table:table-cell>
          <table:table-cell table:style-name="表格73.A3" office:value-type="string">
            <text:p text:style-name="P49">⌈5/2⌉ = 3 個</text:p>
          </table:table-cell>
          <table:table-cell table:style-name="表格73.A3" office:value-type="string">
            <text:p text:style-name="P49">3−1 = 2 個</text:p>
          </table:table-cell>
        </table:table-row>
        <table:table-row table:style-name="表格73.4">
          <table:table-cell table:style-name="表格73.A2" office:value-type="string">
            <text:p text:style-name="P60">6</text:p>
          </table:table-cell>
          <table:table-cell table:style-name="表格73.A2" office:value-type="string">
            <text:p text:style-name="P49">6 個</text:p>
          </table:table-cell>
          <table:table-cell table:style-name="表格73.A2" office:value-type="string">
            <text:p text:style-name="P49">⌈6/2⌉ = 3 個</text:p>
          </table:table-cell>
          <table:table-cell table:style-name="表格73.A2" office:value-type="string">
            <text:p text:style-name="P49">3−1 = 2 個</text:p>
          </table:table-cell>
        </table:table-row>
        <table:table-row table:style-name="表格73.1">
          <table:table-cell table:style-name="表格73.A3" office:value-type="string">
            <text:p text:style-name="P60">7</text:p>
          </table:table-cell>
          <table:table-cell table:style-name="表格73.A3" office:value-type="string">
            <text:p text:style-name="P49">7 個</text:p>
          </table:table-cell>
          <table:table-cell table:style-name="表格73.A3" office:value-type="string">
            <text:p text:style-name="P49">⌈7/2⌉ = 4 個</text:p>
          </table:table-cell>
          <table:table-cell table:style-name="表格73.A3" office:value-type="string">
            <text:p text:style-name="P49">4−1 = 3 個</text:p>
          </table:table-cell>
        </table:table-row>
      </table:table>
      <text:p text:style-name="P92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95">考場上最快的解題流程（不需要記公式）</text:p>
            <text:p text:style-name="P39">題目問：B-Tree order m，非根節點最少幾個 key？</text:p>
            <text:p text:style-name="P94"/>
            <text:p text:style-name="P40">1. <text:span text:style-name="T64">算至少幾個 children</text:span>：⌈m/2⌉ (<text:span text:style-name="T37">非根節點「至少要半滿」</text:span>)</text:p>
            <text:p text:style-name="P39">2. <text:span text:style-name="T64">減 1 </text:span>得 key 數：⌈m/2⌉ − 1</text:p>
            <text:p text:style-name="P94"/>
            <text:p text:style-name="P39">口訣：「<text:span text:style-name="T68">先算孩子，再減 1</text:span>」</text:p>
            <text:p text:style-name="P39">背景邏輯：<text:span text:style-name="T18">非根節點至少半滿</text:span> <text:s/>→ <text:s/>children ÷ 2 向上取整 <text:s/>→ <text:s/>再減 1</text:p>
          </table:table-cell>
        </table:table-row>
      </table:table>
      <text:p text:style-name="P92"><text:s text:c="2"/></text:p>
      <text:p text:style-name="P66"><text:soft-page-break/></text:p>
      <text:h text:style-name="P18" text:outline-level="2"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重要等價關係（必背！）</text:p>
            <text:p text:style-name="P35">2-3 Tree <text:s text:c="3"/>= B-Tree order 3</text:p>
            <text:p text:style-name="P35">2-3-4 Tree <text:s/>= B-Tree order 4 <text:s/>= (2,4)-Tree</text:p>
            <text:p text:style-name="P35"><text:span text:style-name="T60">(2,4)-Tree </text:span><text:s/>的意思：<text:span text:style-name="T2">每節點</text:span>有 <text:span text:style-name="T49">2 ~ 4 個 children</text:span></text:p>
            <text:p text:style-name="P35">Red-Black Tree ≈ 2-3-4 Tree（用二元樹形式表示的 2-3-4 Tree）</text:p>
          </table:table-cell>
        </table:table-row>
      </table:table>
      <text:p text:style-name="Standard"/>
      <text:h text:style-name="P17" text:outline-level="1">第四章　2-3 Tree 插入規則與完整範例</text:h>
      <text:h text:style-name="P18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11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45"><text:s text:c="4"/>[50]</text:p>
                  <text:p text:style-name="P45"><text:s text:c="3"/>/ <text:s text:c="3"/>\</text:p>
                  <text:p text:style-name="P45"><text:s/>(&lt;50) <text:s/>(&gt;50)</text:p>
                </table:table-cell>
              </table:table-row>
            </table:table>
            <text:p text:style-name="P41">只有 1 個 key，有 2 個子樹</text:p>
          </table:table-cell>
          <table:table-cell table:style-name="表格19.B1" office:value-type="string">
            <text:p text:style-name="P81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45"><text:s text:c="2"/>[30 | 60]</text:p>
                  <text:p text:style-name="P45"><text:s/>/ <text:s text:c="3"/>| <text:s text:c="3"/>\</text:p>
                  <text:p text:style-name="P45">(&lt;30)(30-60)(&gt;60)</text:p>
                </table:table-cell>
              </table:table-row>
            </table:table>
            <text:p text:style-name="P41">有 2 個 key，有 3 個子樹</text:p>
          </table:table-cell>
        </table:table-row>
      </table:table>
      <text:p text:style-name="P69"><text:s/></text:p>
      <text:h text:style-name="P18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9">插入流程（牢記）</text:p>
            <text:p text:style-name="P35">Step 1：依照搜尋規則找到正確葉節點</text:p>
            <text:p text:style-name="P35">Step 2：將新值插入該節點</text:p>
            <text:p text:style-name="P35">Step 3：若節點 key 數 ≤ 2 → 合法，結束</text:p>
            <text:p text:style-name="P35">Step 4：若節點有 3 個 key（Overflow）→ 執行 Split</text:p>
            <text:p text:style-name="P35"><text:s text:c="9"/>Split：中間 key 上推至父節點，左右各保留較小/較大 key</text:p>
            <text:p text:style-name="P35">Step 5：父節點若也 Overflow → 繼續往上 Split，直到根</text:p>
            <text:p text:style-name="P35">Step 6：若根節點也 Overflow → 根也 Split，樹高增加 1</text:p>
          </table:table-cell>
        </table:table-row>
      </table:table>
      <text:p text:style-name="P66"><text:s/></text:p>
      <text:h text:style-name="P18" text:outline-level="2">4.3 完整範例：插入 60, 70, 50, 10, 20, 80, 95, 90（112關Q3）</text:h>
      <text:h text:style-name="P5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5">[60]</text:p>
          </table:table-cell>
        </table:table-row>
      </table:table>
      <text:h text:style-name="P5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5">[60 | 70] <text:s text:c="2"/>← 仍合法（2 個 key）</text:p>
          </table:table-cell>
        </table:table-row>
      </table:table>
      <text:h text:style-name="P5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5">插入後：[50 | 60 | 70] <text:s text:c="2"/>← 3 個 key！Overflow！</text:p>
            <text:p text:style-name="P78"/>
            <text:p text:style-name="P45">Split：中間值 60 上推</text:p>
            <text:p text:style-name="P78"/>
            <text:p text:style-name="P45"><text:s text:c="5"/>[60]</text:p>
            <text:p text:style-name="P45"><text:s text:c="4"/>/ <text:s text:c="3"/>\</text:p>
            <text:p text:style-name="P45"><text:s text:c="2"/>[50] <text:s/>[70]</text:p>
          </table:table-cell>
        </table:table-row>
      </table:table>
      <text:h text:style-name="P97" text:outline-level="3"><text:soft-page-break/><text:span text:style-name="T56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5">10 &lt; 60 → 往左子樹</text:p>
            <text:p text:style-name="P78"/>
            <text:p text:style-name="P45"><text:s text:c="5"/>[60]</text:p>
            <text:p text:style-name="P45"><text:s text:c="4"/>/ <text:s text:c="3"/>\</text:p>
            <text:p text:style-name="P45"><text:s/>[10|50] [70]</text:p>
          </table:table-cell>
        </table:table-row>
      </table:table>
      <text:h text:style-name="P5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5">20 &lt; 60 → 往左子樹</text:p>
            <text:p text:style-name="P45">左節點變：[10 | 20 | 50] <text:s text:c="2"/>← Overflow！</text:p>
            <text:p text:style-name="P78"/>
            <text:p text:style-name="P45">Split：中間值 20 上推至根</text:p>
            <text:p text:style-name="P78"/>
            <text:p text:style-name="P45"><text:s text:c="7"/>[20 | 60]</text:p>
            <text:p text:style-name="P45"><text:s text:c="6"/>/ <text:s text:c="4"/>| <text:s text:c="3"/>\</text:p>
            <text:p text:style-name="P45"><text:s text:c="3"/>[10] <text:s text:c="2"/>[50] <text:s/>[70]</text:p>
          </table:table-cell>
        </table:table-row>
      </table:table>
      <text:h text:style-name="P5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45">80 &gt; 60 → 往右子樹</text:p>
            <text:p text:style-name="P78"/>
            <text:p text:style-name="P45"><text:s text:c="7"/>[20 | 60]</text:p>
            <text:p text:style-name="P45"><text:s text:c="6"/>/ <text:s text:c="4"/>| <text:s text:c="4"/>\</text:p>
            <text:p text:style-name="P45"><text:s text:c="3"/>[10] <text:s text:c="2"/>[50] <text:s/>[70|80]</text:p>
          </table:table-cell>
        </table:table-row>
      </table:table>
      <text:h text:style-name="P5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45">95 &gt; 60 → 往右子樹</text:p>
            <text:p text:style-name="P45">右節點變：[70 | 80 | 95] <text:s text:c="2"/>← Overflow！</text:p>
            <text:p text:style-name="P78"/>
            <text:p text:style-name="P45">Split：中間值 80 上推至根</text:p>
            <text:p text:style-name="P45">根變：[20 | 60 | 80] <text:s text:c="2"/>← 根也 Overflow！</text:p>
            <text:p text:style-name="P78"/>
            <text:p text:style-name="P45">根 Split：中間值 60 上推，產生新根</text:p>
            <text:p text:style-name="P78"/>
            <text:p text:style-name="P45"><text:s text:c="10"/>[60]</text:p>
            <text:p text:style-name="P45"><text:s text:c="9"/>/ <text:s text:c="3"/>\</text:p>
            <text:p text:style-name="P45"><text:s text:c="6"/>[20] <text:s text:c="3"/>[80]</text:p>
            <text:p text:style-name="P45"><text:s text:c="5"/>/ <text:s text:c="3"/>\ <text:s/>/ <text:s text:c="3"/>\</text:p>
            <text:p text:style-name="P45"><text:s text:c="2"/>[10] [50][70] <text:s/>[95]</text:p>
          </table:table-cell>
        </table:table-row>
      </table:table>
      <text:h text:style-name="P5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45">90 &gt; 60 → 右子樹 [80]</text:p>
            <text:p text:style-name="P45">90 &gt; 80 → 右子樹 [95]</text:p>
            <text:p text:style-name="P45">插入 [95] → [90 | 95] <text:s text:c="2"/>← 合法</text:p>
            <text:p text:style-name="P78"/>
            <text:p text:style-name="P45"><text:s text:c="10"/>[60]</text:p>
            <text:p text:style-name="P78"><text:soft-page-break/><text:span text:style-name="T34"><text:s text:c="9"/>/ <text:s text:c="3"/>\</text:span></text:p>
            <text:p text:style-name="P45"><text:s text:c="6"/>[20] <text:s text:c="3"/>[80]</text:p>
            <text:p text:style-name="P45"><text:s text:c="5"/>/ <text:s text:c="3"/>\ <text:s/>/ <text:s text:c="5"/>\</text:p>
            <text:p text:style-name="P45"><text:s text:c="2"/>[10] [50][70] <text:s/>[90|95] <text:s text:c="2"/>✅ 建立完成！</text:p>
          </table:table-cell>
        </table:table-row>
      </table:table>
      <text:p text:style-name="Standard"/>
      <text:h text:style-name="P17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8">本章只有一句核心思想</text:p>
            <text:p text:style-name="P103"><text:span text:style-name="T3">插入太胖 → Split（分裂）</text:span> <text:s/>； <text:s/><text:span text:style-name="T69">刪除太瘦 → Borrow（借）或 Merge（合併）</text:span></text:p>
            <text:p text:style-name="P103">只要把「太瘦」的問題搞清楚，整章就通了。</text:p>
          </table:table-cell>
        </table:table-row>
      </table:table>
      <text:p text:style-name="P118"/>
      <text:h text:style-name="P100" text:outline-level="1">5.1 <text:s/>刪除的本質：Underflow（太瘦了）</text:h>
      <text:p text:style-name="P104">插入時，節點可能「塞太多」→ Overflow，用 Split 解決。</text:p>
      <text:p text:style-name="P104">刪除時，節點可能「變太空」→ Underflow，用 Borrow 或 Merge 解決。</text:p>
      <text:p text:style-name="P118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27">現象名稱</text:p>
          </table:table-cell>
          <table:table-cell table:style-name="表格30.A1" office:value-type="string">
            <text:p text:style-name="P27">原因 / 說明</text:p>
          </table:table-cell>
        </table:table-row>
        <table:table-row table:style-name="表格30.1">
          <table:table-cell table:style-name="表格30.A2" office:value-type="string">
            <text:p text:style-name="P125">現象名稱</text:p>
          </table:table-cell>
          <table:table-cell table:style-name="表格30.A2" office:value-type="string">
            <text:p text:style-name="P108">原因</text:p>
          </table:table-cell>
        </table:table-row>
        <table:table-row table:style-name="表格30.1">
          <table:table-cell table:style-name="表格30.A3" office:value-type="string">
            <text:p text:style-name="P125">Overflow</text:p>
          </table:table-cell>
          <table:table-cell table:style-name="表格30.A3" office:value-type="string">
            <text:p text:style-name="P119"><text:span text:style-name="T23">節點 key 超過上限</text:span><text:span text:style-name="T70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125">Underflow</text:p>
          </table:table-cell>
          <table:table-cell table:style-name="表格30.A2" office:value-type="string">
            <text:p text:style-name="P119"><text:span text:style-name="T72">刪除後</text:span><text:span text:style-name="T53">節點 key 低於下限</text:span><text:span text:style-name="T70">（</text:span><text:span text:style-name="T79">變成 0 個</text:span><text:span text:style-name="T70">）</text:span></text:p>
          </table:table-cell>
        </table:table-row>
      </table:table>
      <text:p text:style-name="P11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35">✅ <text:s/>Underflow 就是「空節點」</text:p>
            <text:p text:style-name="P120"><text:span text:style-name="T40">2-3 Tree 規定每個節點至少要有 1 個 key</text:span><text:span text:style-name="T74">。</text:span><text:span text:style-name="T80">刪除後若節點變成 [ ] 空節點</text:span><text:span text:style-name="T74">，就是 </text:span><text:span text:style-name="T72">Underflow</text:span><text:span text:style-name="T74">，必須修復。</text:span></text:p>
          </table:table-cell>
        </table:table-row>
      </table:table>
      <text:p text:style-name="P118"/>
      <text:h text:style-name="P100" text:outline-level="1">5.2 <text:s/>刪除的三種結果</text:h>
      <text:p text:style-name="P104">刪除任意一個 key 後，只會落入下面三種情況之一：</text:p>
      <text:p text:style-name="P118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27">Case</text:p>
          </table:table-cell>
          <table:table-cell table:style-name="表格32.A1" office:value-type="string">
            <text:p text:style-name="P27">條件</text:p>
          </table:table-cell>
        </table:table-row>
        <table:table-row table:style-name="表格32.1">
          <table:table-cell table:style-name="表格32.A2" office:value-type="string">
            <text:p text:style-name="P125">Case 1</text:p>
          </table:table-cell>
          <table:table-cell table:style-name="表格32.A2" office:value-type="string">
            <text:p text:style-name="P119"><text:span text:style-name="T70">刪完後</text:span><text:span text:style-name="T47">節點仍有 key</text:span></text:p>
          </table:table-cell>
        </table:table-row>
        <table:table-row table:style-name="表格32.1">
          <table:table-cell table:style-name="表格32.A3" office:value-type="string">
            <text:p text:style-name="P125">Case 2</text:p>
          </table:table-cell>
          <table:table-cell table:style-name="表格32.A3" office:value-type="string">
            <text:p text:style-name="P119"><text:span text:style-name="T70">刪完後</text:span><text:span text:style-name="T47">節點變空</text:span><text:span text:style-name="T70">，且</text:span><text:span text:style-name="T23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125">Case 3</text:p>
          </table:table-cell>
          <table:table-cell table:style-name="表格32.A2" office:value-type="string">
            <text:p text:style-name="P119"><text:span text:style-name="T70">刪完後</text:span><text:span text:style-name="T47">節點變空</text:span><text:span text:style-name="T70">，且</text:span><text:span text:style-name="T23">兄弟只有 1 個 key</text:span></text:p>
          </table:table-cell>
        </table:table-row>
      </table:table>
      <text:p text:style-name="P11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30">Case 1 範例</text:p>
            <text:p text:style-name="P117">[10 | 20] <text:s/>刪除 20 <text:s/>→ <text:s/>[10] <text:s/>← 仍有 1 個 key，完全合法，結束。</text:p>
          </table:table-cell>
        </table:table-row>
      </table:table>
      <text:p text:style-name="P118"/>
      <text:h text:style-name="P121" text:outline-level="1"><text:soft-page-break/><text:span text:style-name="T84">5.3 <text:s/>Borrow（借）的完整原理</text:span></text:h>
      <text:h text:style-name="P134" text:outline-level="2">5.3.1 <text:s/>為什麼不能「直接」把兄弟的 key 搬過來？</text:h>
      <text:p text:style-name="P104">這是超級新手最常卡住的地方。看下面的例子：</text:p>
      <text:p text:style-name="P118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9">刪除 10 之後，左邊空了：</text:p>
            <text:p text:style-name="P52"><text:s text:c="8"/>[20] <text:s text:c="7"/></text:p>
            <text:p text:style-name="P52"><text:s text:c="7"/>/ <text:s text:c="3"/>\ <text:s text:c="6"/></text:p>
            <text:p text:style-name="P52"><text:s text:c="6"/>[] <text:s text:c="2"/>[50|70] <text:s/></text:p>
          </table:table-cell>
        </table:table-row>
      </table:table>
      <text:p text:style-name="P118"/>
      <text:p text:style-name="P104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22"><text:span text:style-name="T29">⚠️ <text:s/></text:span><text:span text:style-name="T30">直接搬會破壞搜尋樹規則！</text:span></text:p>
            <text:p text:style-name="P120"><text:span text:style-name="T40">搜尋樹規定：左子樹所有值 &lt; 父節點 key &lt; 右子樹所有值</text:span><text:span text:style-name="T74">。 若把 50 直接搬到左邊，50 會跑到 [20] 左側，但 50 &gt; 20，完全違規！</text:span></text:p>
          </table:table-cell>
        </table:table-row>
      </table:table>
      <text:p text:style-name="P118"/>
      <text:h text:style-name="P123" text:outline-level="2"><text:span text:style-name="T85">5.3.2 <text:s/></text:span><text:span text:style-name="T86">Borrow</text:span><text:span text:style-name="T85"> 的正確流程：</text:span><text:span text:style-name="T54">父下兄上</text:span></text:h>
      <text:p text:style-name="P145"><text:span text:style-name="T75">Borrow 的核心動作是「</text:span><text:span text:style-name="T48">父節點下降、兄弟節點上升</text:span><text:span text:style-name="T75">」，這樣才能維持搜尋順序。</text:span></text:p>
      <text:p text:style-name="P118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27">步驟</text:p>
          </table:table-cell>
          <table:table-cell table:style-name="表格36.A1" office:value-type="string">
            <text:p text:style-name="P27">說明</text:p>
          </table:table-cell>
        </table:table-row>
        <table:table-row table:style-name="表格36.1">
          <table:table-cell table:style-name="表格36.A2" office:value-type="string">
            <text:p text:style-name="P125">Step 1</text:p>
          </table:table-cell>
          <table:table-cell table:style-name="表格36.A2" office:value-type="string">
            <text:p text:style-name="P119"><text:span text:style-name="T72">父節點</text:span><text:span text:style-name="T70">中，「</text:span><text:span text:style-name="T23">夾在空節點與兄弟之間的 key</text:span><text:span text:style-name="T70">」</text:span><text:span text:style-name="T71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125">Step 2</text:p>
          </table:table-cell>
          <table:table-cell table:style-name="表格36.A3" office:value-type="string">
            <text:p text:style-name="P119"><text:span text:style-name="T73">兄弟節點</text:span><text:span text:style-name="T70">中，「</text:span><text:span text:style-name="T53">最靠近父節點的 key</text:span><text:span text:style-name="T70">」</text:span><text:span text:style-name="T71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125">結果</text:p>
          </table:table-cell>
          <table:table-cell table:style-name="表格36.A2" office:value-type="string">
            <text:p text:style-name="P119"><text:span text:style-name="T72">空節點得到一個 key</text:span><text:span text:style-name="T70">，搜尋樹規則完整保留</text:span></text:p>
          </table:table-cell>
        </table:table-row>
      </table:table>
      <text:p text:style-name="P118"/>
      <text:p text:style-name="P133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26">Step 1：父節點 [20] 的 key「20」下降</text:p>
            <text:p text:style-name="P52"><text:s text:c="8"/>[?] <text:s text:c="8"/></text:p>
            <text:p text:style-name="P52"><text:s text:c="7"/>/ <text:s text:c="3"/>\ <text:s text:c="6"/></text:p>
            <text:p text:style-name="P52"><text:s text:c="5"/>[20] <text:s/>[50|70] <text:s/></text:p>
          </table:table-cell>
        </table:table-row>
      </table:table>
      <text:p text:style-name="P11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36">Step 2：右兄弟最小值「50」上升填補父節點空缺</text:p>
            <text:p text:style-name="P52"><text:s text:c="8"/>[50] <text:s text:c="7"/></text:p>
            <text:p text:style-name="P52"><text:s text:c="7"/>/ <text:s text:c="3"/>\ <text:s text:c="6"/></text:p>
            <text:p text:style-name="P52"><text:s text:c="5"/>[20] <text:s text:c="2"/>[70] <text:s text:c="2"/>✅</text:p>
          </table:table-cell>
        </table:table-row>
      </table:table>
      <text:p text:style-name="P118"/>
      <text:h text:style-name="P134" text:outline-level="2">5.3.3 <text:s/>從左借 vs. 從右借</text:h>
      <text:p text:style-name="P104">根據空節點的兄弟在左邊還是右邊，Borrow 的方向不同，但口訣同一條：</text:p>
      <text:p text:style-name="P118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6">Borrow 黃金口訣</text:p>
            <text:p text:style-name="P105"><text:span text:style-name="T2">從左兄弟借</text:span> <text:s/>→ <text:s/><text:span text:style-name="T49">取左兄弟的「最大值」上升</text:span></text:p>
            <text:p text:style-name="P106"><text:span text:style-name="T2">從右兄弟借</text:span> <text:s/>→ <text:s/><text:span text:style-name="T45">取右兄弟的「最小值」上升</text:span></text:p>
            <text:p text:style-name="P109">（都是<text:span text:style-name="T37">「最靠近空節點」的那個 key</text:span>）</text:p>
          </table:table-cell>
        </table:table-row>
      </table:table>
      <text:p text:style-name="P118"/>
      <text:p text:style-name="P133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26">空節點在中間，左兄弟 [10|20] 有兩個 key</text:p>
            <text:p text:style-name="P52"><text:s text:c="7"/>[40|80] <text:s text:c="7"/></text:p>
            <text:p text:style-name="P52"><text:s text:c="6"/>/ <text:s text:c="2"/>| <text:s text:c="2"/>\ <text:s text:c="6"/></text:p>
            <text:p text:style-name="P52"><text:s text:c="2"/>[10|20] [] <text:s/>[90] <text:s text:c="3"/></text:p>
          </table:table-cell>
        </table:table-row>
      </table:table>
      <text:p text:style-name="P118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36"><text:span text:style-name="T64">父 40 下降，左兄弟最大值 20 上升</text:span> → 完成</text:p>
            <text:p text:style-name="P52"><text:s text:c="7"/>[20|80] <text:s text:c="7"/></text:p>
            <text:p text:style-name="P52"><text:s text:c="6"/>/ <text:s text:c="2"/>| <text:s text:c="2"/>\ <text:s text:c="6"/></text:p>
            <text:p text:style-name="P52"><text:s text:c="4"/>[10] [40] [90] <text:s/>✅ </text:p>
          </table:table-cell>
        </table:table-row>
      </table:table>
      <text:p text:style-name="P118"/>
      <text:h text:style-name="P134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10">大多數教材規定：優先選左兄弟。若左兄弟無法借（只有 1 個 key），再看右兄弟。</text:p>
            <text:p text:style-name="P140">⚠️ 考試若題目未指定，依左優先原則作答即可。</text:p>
          </table:table-cell>
        </table:table-row>
      </table:table>
      <text:p text:style-name="P118"/>
      <text:h text:style-name="P100" text:outline-level="1">5.4 <text:s/>Merge（合併）的完整原理</text:h>
      <text:h text:style-name="P134" text:outline-level="2">5.4.1 <text:s/>什麼情況下進入 Merge？</text:h>
      <text:p text:style-name="P104"><text:span text:style-name="T64">當節點變空</text:span>，而且<text:span text:style-name="T9">左右兄弟都只有 1 個 key</text:span>（<text:span text:style-name="T66">沒有多餘的 key 可以借</text:span>），<text:span text:style-name="T64">就必須 Merge</text:span>。</text:p>
      <text:p text:style-name="P118"/>
      <text:h text:style-name="P134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27">步驟</text:p>
          </table:table-cell>
          <table:table-cell table:style-name="表格78.A1" office:value-type="string">
            <text:p text:style-name="P27">說明</text:p>
          </table:table-cell>
        </table:table-row>
        <table:table-row table:style-name="表格78.1">
          <table:table-cell table:style-name="表格78.A2" office:value-type="string">
            <text:p text:style-name="P125">Step 1</text:p>
          </table:table-cell>
          <table:table-cell table:style-name="表格78.A2" office:value-type="string">
            <text:p text:style-name="P108">找到「<text:span text:style-name="T49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125">Step 2</text:p>
          </table:table-cell>
          <table:table-cell table:style-name="表格78.A3" office:value-type="string">
            <text:p text:style-name="P108">該父 key 下降</text:p>
          </table:table-cell>
        </table:table-row>
        <table:table-row table:style-name="表格78.1">
          <table:table-cell table:style-name="表格78.A2" office:value-type="string">
            <text:p text:style-name="P125">Step 3</text:p>
          </table:table-cell>
          <table:table-cell table:style-name="表格78.A2" office:value-type="string">
            <text:p text:style-name="P108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125">Step 4</text:p>
          </table:table-cell>
          <table:table-cell table:style-name="表格78.A3" office:value-type="string">
            <text:p text:style-name="P108">父節點失去一個 key 後，檢查父節點是否也空了（若空了，繼續往上）</text:p>
          </table:table-cell>
        </table:table-row>
      </table:table>
      <text:p text:style-name="P118"/>
      <text:p text:style-name="P145"><text:soft-page-break/><text:span text:style-name="T87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39">刪除 50 後右邊空了，<text:span text:style-name="T64">兄弟 [10] 只有 1 個 key，無法借</text:span></text:p>
            <text:p text:style-name="P52"><text:s text:c="7"/>[20] <text:s text:c="4"/></text:p>
            <text:p text:style-name="P52"><text:s text:c="6"/>/ <text:s text:c="3"/>\ <text:s text:c="3"/></text:p>
            <text:p text:style-name="P52"><text:s text:c="3"/>[10] <text:s text:c="3"/>[] <text:s text:c="2"/></text:p>
          </table:table-cell>
        </table:table-row>
      </table:table>
      <text:p text:style-name="P118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38">父 20 下降，與兄弟 [10] 合併為 [10|20]</text:p>
            <text:p text:style-name="P52"><text:s text:c="4"/>[10|20] <text:s text:c="3"/>✅ </text:p>
          </table:table-cell>
        </table:table-row>
      </table:table>
      <text:p text:style-name="P118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30">為什麼 Merge 之後合法？</text:p>
            <text:p text:style-name="P111"><text:span text:style-name="T64">空節點（0 個 key）</text:span>+ <text:span text:style-name="T64">父 key（1 個）</text:span>+ <text:span text:style-name="T64">兄弟（1 個）</text:span>= <text:span text:style-name="T49">新節點（2 個 key）</text:span>。</text:p>
            <text:p text:style-name="P111"><text:span text:style-name="T88">2 個 key 完全符合 2-3 Tree 上限</text:span>，合法！</text:p>
          </table:table-cell>
        </table:table-row>
      </table:table>
      <text:p text:style-name="P118"/>
      <text:h text:style-name="P100" text:outline-level="1">5.5 <text:s/>Cascade Merge（連鎖合併）與 Root 消失</text:h>
      <text:h text:style-name="P134" text:outline-level="2">5.5.1 <text:s/>什麼是 Cascade Merge？</text:h>
      <text:p text:style-name="P104">Merge 之後父節點可能也因此失去了自己的 key，變空。這時候父節點又觸發一輪新的 Borrow 或 Merge，一路向上傳遞，就叫做「連鎖 Merge（Cascade Merge）」。</text:p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26">範例起始樹：</text:p>
            <text:p text:style-name="P52"><text:s text:c="12"/>[50] <text:s text:c="11"/></text:p>
            <text:p text:style-name="P52"><text:s text:c="11"/>/ <text:s text:c="3"/>\ <text:s text:c="10"/></text:p>
            <text:p text:style-name="P52"><text:s text:c="9"/>[20] <text:s text:c="2"/>[80] <text:s text:c="7"/></text:p>
            <text:p text:style-name="P52"><text:s text:c="8"/>/ <text:s text:c="2"/>\ <text:s text:c="2"/>/ <text:s text:c="2"/>\ <text:s text:c="6"/></text:p>
            <text:p text:style-name="P52"><text:s text:c="6"/>[10] [30][70] [90] <text:s text:c="3"/></text:p>
          </table:table-cell>
        </table:table-row>
      </table:table>
      <text:p text:style-name="P118"/>
      <text:p text:style-name="P107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39">Step 1：直接刪 30，右邊空了</text:p>
            <text:p text:style-name="P52"><text:s text:c="12"/>[50] <text:s text:c="8"/></text:p>
            <text:p text:style-name="P52"><text:s text:c="11"/>/ <text:s text:c="3"/>\ <text:s text:c="7"/></text:p>
            <text:p text:style-name="P52"><text:s text:c="9"/>[20] <text:s text:c="2"/>[80] <text:s text:c="4"/></text:p>
            <text:p text:style-name="P53"><text:s text:c="8"/>/ <text:s text:c="2"/>\ <text:s text:c="2"/>/ <text:s text:c="2"/>\ <text:s text:c="8"/></text:p>
            <text:p text:style-name="P53"><text:s text:c="6"/>[10] <text:s/>[] [70] [90] <text:s text:c="9"/></text:p>
          </table:table-cell>
        </table:table-row>
      </table:table>
      <text:p text:style-name="P118"/>
      <text:p text:style-name="P104"><text:span text:style-name="T2">兄弟 [10] 只有 1 個 key，無法借</text:span> → <text:span text:style-name="T18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36">Step 2：<text:span text:style-name="T89">父 20 下降，與 [10] 合併</text:span>，父節點消失</text:p>
            <text:p text:style-name="P52"><text:s text:c="10"/>[50] <text:s text:c="7"/></text:p>
            <text:p text:style-name="P52"><text:s text:c="9"/>/ <text:s text:c="3"/>\ <text:s text:c="6"/></text:p>
            <text:p text:style-name="P52"><text:s text:c="6"/>[10|20] [80] <text:s text:c="3"/></text:p>
            <text:p text:style-name="P124"><text:soft-page-break/><text:span text:style-name="T34"><text:s text:c="14"/>/ <text:s text:c="2"/>\ <text:s text:c="2"/></text:span></text:p>
            <text:p text:style-name="P52"><text:s text:c="11"/>[70] [90] <text:s/>✅</text:p>
          </table:table-cell>
        </table:table-row>
      </table:table>
      <text:p text:style-name="P118"/>
      <text:p text:style-name="P104">這個例子只有一層 Merge。若父節點合併後也空掉，就會繼續往祖父節點傳遞。</text:p>
      <text:p text:style-name="P118"/>
      <text:h text:style-name="P134" text:outline-level="2">5.5.2 <text:s/>Root 消失（樹高下降）</text:h>
      <text:p text:style-name="P104"><text:span text:style-name="T37">Cascade Merge 一路傳遞到根節點（Root）</text:span>時，<text:span text:style-name="T2">Root 自己也可能因為失去 key 而消失</text:span>。<text:span text:style-name="T46">這是 2-3 Tree 中「樹高下降」的唯一時機</text:span>。</text:p>
      <text:p text:style-name="P118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2">⚠️ <text:span text:style-name="T25"><text:s/>Root 是特例！</text:span></text:p>
            <text:p text:style-name="P111"><text:span text:style-name="T49">一般節點：至少 1 個 key</text:span>。 Root 例外：<text:span text:style-name="T64">當 Merge 後 Root 自然消失時</text:span>，<text:span text:style-name="T26">下面那層升上來成為新 Root，樹高減少 1</text:span>。</text:p>
          </table:table-cell>
        </table:table-row>
      </table:table>
      <text:p text:style-name="P118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47">Root 消失範例：<text:span text:style-name="T68">Merge 後只剩一個節點</text:span>，<text:span text:style-name="T25">它升為新 Root</text:span></text:p>
            <text:p text:style-name="P52">原本： <text:s text:c="8"/>[50] <text:s text:c="6"/></text:p>
            <text:p text:style-name="P52"><text:s text:c="14"/>/ <text:s text:c="3"/>\ <text:s text:c="5"/></text:p>
            <text:p text:style-name="P52"><text:s text:c="11"/>[20] <text:s text:c="2"/>[] <text:s text:c="5"/></text:p>
            <text:p text:style-name="P52"><text:s text:c="26"/></text:p>
            <text:p text:style-name="P52">Merge 後： <text:s/>[20|50] <text:s text:c="6"/></text:p>
            <text:p text:style-name="P52">（<text:span text:style-name="T2">Root 消失</text:span>，<text:span text:style-name="T46">[20|50] 成為新 Root</text:span>，<text:span text:style-name="T37">樹高從 2 降為 1</text:span>）</text:p>
          </table:table-cell>
        </table:table-row>
      </table:table>
      <text:p text:style-name="P118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98">Cascade Merge 連鎖口訣</text:p>
            <text:p text:style-name="P103">Merge 完問一句：「父節點還有 key 嗎？」</text:p>
            <text:p text:style-name="P103">有 key → 結束 <text:s/>· <text:s/><text:span text:style-name="T12">沒 key → 父節點變成新的空節點</text:span>，繼續修</text:p>
            <text:p text:style-name="P103">修到 Root 也空 → <text:span text:style-name="T37">Root 消失，樹高 - 1</text:span></text:p>
          </table:table-cell>
        </table:table-row>
      </table:table>
      <text:p text:style-name="P118"/>
      <text:h text:style-name="P100" text:outline-level="1">5.6 <text:s/>Successor 與 Predecessor（<text:span text:style-name="T90">內部節點的</text:span><text:span text:style-name="T91">替身</text:span>）</text:h>
      <text:h text:style-name="P134" text:outline-level="2">5.6.1 <text:s/><text:span text:style-name="T25">為什麼內部節點不能直接刪？</text:span></text:h>
      <text:p text:style-name="P104"><text:span text:style-name="T62">內部節點的 key </text:span>負責<text:span text:style-name="T10">「分隔」左右子樹的範圍</text:span>。<text:span text:style-name="T92">若直接刪掉，樹結構會失去方向感</text:span>，搜尋規則被破壞。</text:p>
      <text:p text:style-name="P118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39">直接刪 60 的災難：子樹不知道方向</text:p>
            <text:p text:style-name="P52">原本： <text:s text:c="2"/>[60] <text:s text:c="4"/>直接刪： <text:s text:c="3"/>[] <text:s text:c="5"/></text:p>
            <text:p text:style-name="P52"><text:s text:c="7"/>/ <text:s text:c="3"/>\ <text:s text:c="12"/>/ <text:s text:c="2"/>\ <text:s text:c="3"/></text:p>
            <text:p text:style-name="P52"><text:s text:c="5"/>[20] <text:s/>[80] <text:s text:c="8"/>[20] [80] <text:s/>← 違法！</text:p>
          </table:table-cell>
        </table:table-row>
      </table:table>
      <text:p text:style-name="P118"/>
      <text:h text:style-name="P123" text:outline-level="2"><text:soft-page-break/><text:span text:style-name="T85">5.6.2 <text:s/>解法：</text:span><text:span text:style-name="T24">先找替身</text:span><text:span text:style-name="T85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27">名稱</text:p>
          </table:table-cell>
          <table:table-cell table:style-name="表格89.A1" office:value-type="string">
            <text:p text:style-name="P27">定義</text:p>
          </table:table-cell>
        </table:table-row>
        <table:table-row table:style-name="表格89.1">
          <table:table-cell table:style-name="表格89.A2" office:value-type="string">
            <text:p text:style-name="P128">後繼（Successor）</text:p>
          </table:table-cell>
          <table:table-cell table:style-name="表格89.A2" office:value-type="string">
            <text:p text:style-name="P108"><text:span text:style-name="T9">比被刪 key「大」的</text:span><text:span text:style-name="T49">最小值</text:span></text:p>
          </table:table-cell>
        </table:table-row>
        <table:table-row table:style-name="表格89.1">
          <table:table-cell table:style-name="表格89.A3" office:value-type="string">
            <text:p text:style-name="P128">前驅（Predecessor）</text:p>
          </table:table-cell>
          <table:table-cell table:style-name="表格89.A3" office:value-type="string">
            <text:p text:style-name="P108"><text:span text:style-name="T37">比被刪 key「小」的</text:span><text:span text:style-name="T49">最大值</text:span></text:p>
          </table:table-cell>
        </table:table-row>
      </table:table>
      <text:p text:style-name="P118"/>
      <text:p text:style-name="P133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12"><text:span text:style-name="T2">後繼（右子樹最小值）</text:span>一定滿足：<text:span text:style-name="T19">比被刪 key 大，且比右子樹其他所有值都小</text:span>。</text:p>
            <text:p text:style-name="P113"><text:span text:style-name="T2">前驅（左子樹最大值）</text:span>一定滿足：<text:span text:style-name="T93">比被刪 key 小，且比左子樹其他所有值都大</text:span>。</text:p>
            <text:p text:style-name="P127">→ 替換後，左 &lt; 新key &lt; 右 的搜尋規則完全不變！</text:p>
          </table:table-cell>
        </table:table-row>
      </table:table>
      <text:p text:style-name="P118"/>
      <text:h text:style-name="P134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27">步驟</text:p>
          </table:table-cell>
          <table:table-cell table:style-name="表格91.A1" office:value-type="string">
            <text:p text:style-name="P27">說明</text:p>
          </table:table-cell>
        </table:table-row>
        <table:table-row table:style-name="表格91.1">
          <table:table-cell table:style-name="表格91.A2" office:value-type="string">
            <text:p text:style-name="P125">Step 1</text:p>
          </table:table-cell>
          <table:table-cell table:style-name="表格91.A2" office:value-type="string">
            <text:p text:style-name="P76">找到後繼（或前驅）</text:p>
          </table:table-cell>
        </table:table-row>
        <table:table-row table:style-name="表格91.1">
          <table:table-cell table:style-name="表格91.A3" office:value-type="string">
            <text:p text:style-name="P125">Step 2</text:p>
          </table:table-cell>
          <table:table-cell table:style-name="表格91.A3" office:value-type="string">
            <text:p text:style-name="P108"><text:span text:style-name="T94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125">Step 3</text:p>
          </table:table-cell>
          <table:table-cell table:style-name="表格91.A2" office:value-type="string">
            <text:p text:style-name="P90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125">Step 4</text:p>
          </table:table-cell>
          <table:table-cell table:style-name="表格91.A3" office:value-type="string">
            <text:p text:style-name="P108">此時問題已轉換為「刪除葉節點」，套用一般流程（Borrow / Merge）</text:p>
          </table:table-cell>
        </table:table-row>
      </table:table>
      <text:p text:style-name="P118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126">範例：刪除 80（內部節點）</text:p>
            <text:p text:style-name="P52">目前樹： <text:s text:c="2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80]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18">找後繼：右子樹最小值 = 90</text:span> <text:s text:c="6"/></text:p>
            <text:p text:style-name="P52">→ <text:span text:style-name="T64">用 90 取代 80：</text:span> <text:s text:c="15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<text:span text:style-name="T64">[90]</text:span>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3">刪葉節點 [90|95] 中的 90</text:span>： <text:s text:c="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90] <text:s text:c="13"/></text:p>
            <text:p text:style-name="P52"><text:s text:c="15"/>/ <text:s text:c="2"/>\ <text:s text:c="12"/></text:p>
            <text:p text:style-name="P52"><text:s text:c="12"/>[70] <text:s text:c="2"/>[95] <text:s text:c="2"/>✅ <text:s text:c="4"/></text:p>
          </table:table-cell>
        </table:table-row>
      </table:table>
      <text:p text:style-name="P118"/>
      <text:h text:style-name="P121" text:outline-level="1"><text:soft-page-break/><text:span text:style-name="T84">5.7 <text:s/>完整刪除範例：刪 50 → 刪 20 → 刪 80（含完整推導）</text:span></text:h>
      <text:p text:style-name="P104">起始樹（第四章插入 60, 70, 50, 10, 20, 80, 95, 90 後的結果）：</text:p>
      <text:p text:style-name="P118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1">起始樹</text:p>
            <text:p text:style-name="P52"><text:s text:c="12"/>[60] <text:s text:c="16"/></text:p>
            <text:p text:style-name="P52"><text:s text:c="11"/>/ <text:s text:c="3"/>\ <text:s text:c="15"/></text:p>
            <text:p text:style-name="P52"><text:s text:c="8"/>[20] <text:s text:c="3"/>[80] <text:s text:c="12"/></text:p>
            <text:p text:style-name="P52"><text:s text:c="8"/>/ <text:s/>\ <text:s text:c="3"/>/ <text:s text:c="2"/>\ <text:s text:c="11"/></text:p>
            <text:p text:style-name="P52"><text:s text:c="5"/>[10] [50][70] [90|95] <text:s text:c="6"/></text:p>
          </table:table-cell>
        </table:table-row>
      </table:table>
      <text:p text:style-name="P118"/>
      <text:p text:style-name="P118"/>
      <text:h text:style-name="P134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27">判斷點</text:p>
          </table:table-cell>
          <table:table-cell table:style-name="表格94.A1" office:value-type="string">
            <text:p text:style-name="P27">結果</text:p>
          </table:table-cell>
        </table:table-row>
        <table:table-row table:style-name="表格94.1">
          <table:table-cell table:style-name="表格94.A2" office:value-type="string">
            <text:p text:style-name="P125">50 是葉節點嗎？</text:p>
          </table:table-cell>
          <table:table-cell table:style-name="表格94.A2" office:value-type="string">
            <text:p text:style-name="P108">是 → 直接刪</text:p>
          </table:table-cell>
        </table:table-row>
        <table:table-row table:style-name="表格94.1">
          <table:table-cell table:style-name="表格94.A3" office:value-type="string">
            <text:p text:style-name="P129">刪完後？</text:p>
          </table:table-cell>
          <table:table-cell table:style-name="表格94.A3" office:value-type="string">
            <text:p text:style-name="P149">[50] 變空 → Underflow！(<text:span text:style-name="T95">✅ <text:s/>Underflow 就是「空節點」</text:span></text:p>
            <text:p text:style-name="P149"><text:span text:style-name="T39">2-3 Tree 規定每個節點至少要有 1 個 key</text:span><text:span text:style-name="T76">。</text:span><text:span text:style-name="T81">刪除後若節點變成 [ ] 空節點，就是 </text:span><text:span text:style-name="T77">Underflow</text:span><text:span text:style-name="T82">，</text:span><text:span text:style-name="T78">必須修復。</text:span><text:span text:style-name="T96">)</text:span></text:p>
          </table:table-cell>
        </table:table-row>
        <table:table-row table:style-name="表格94.1">
          <table:table-cell table:style-name="表格94.A2" office:value-type="string">
            <text:p text:style-name="P125"><text:span text:style-name="T68">左兄弟 [10]</text:span>？</text:p>
          </table:table-cell>
          <table:table-cell table:style-name="表格94.A2" office:value-type="string">
            <text:p text:style-name="P108"><text:span text:style-name="T96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125"><text:span text:style-name="T68">右兄弟 [70]</text:span>？</text:p>
          </table:table-cell>
          <table:table-cell table:style-name="表格94.A3" office:value-type="string">
            <text:p text:style-name="P108"><text:span text:style-name="T96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125">結論</text:p>
          </table:table-cell>
          <table:table-cell table:style-name="表格94.A2" office:value-type="string">
            <text:p text:style-name="P151">Borrow 失敗 → <text:span text:style-name="T57">進入 Merge</text:span></text:p>
          </table:table-cell>
        </table:table-row>
        <table:table-row table:style-name="表格94.1">
          <table:table-cell table:style-name="表格94.A3" office:value-type="string">
            <text:p text:style-name="P125">Merge 動作</text:p>
          </table:table-cell>
          <table:table-cell table:style-name="表格94.A3" office:value-type="string">
            <text:p text:style-name="P108">父 key「20」下降，與兄弟 [10] 合併 → [10|20]</text:p>
          </table:table-cell>
        </table:table-row>
      </table:table>
      <text:p text:style-name="P118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36">刪除 5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6"/>[10|2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27">判斷點</text:p>
          </table:table-cell>
          <table:table-cell table:style-name="表格96.A1" office:value-type="string">
            <text:p text:style-name="P27">結果</text:p>
          </table:table-cell>
        </table:table-row>
        <table:table-row table:style-name="表格96.1">
          <table:table-cell table:style-name="表格96.A2" office:value-type="string">
            <text:p text:style-name="P125">20 是葉節點嗎？</text:p>
          </table:table-cell>
          <table:table-cell table:style-name="表格96.A2" office:value-type="string">
            <text:p text:style-name="P108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125">刪完後？</text:p>
          </table:table-cell>
          <table:table-cell table:style-name="表格96.A3" office:value-type="string">
            <text:p text:style-name="P152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125">結論</text:p>
          </table:table-cell>
          <table:table-cell table:style-name="表格96.A2" office:value-type="string">
            <text:p text:style-name="P108">Case 1，直接結束，不需 Borrow 或 Merge</text:p>
          </table:table-cell>
        </table:table-row>
      </table:table>
      <text:p text:style-name="P118"/>
      <table:table table:name="表格97" table:style-name="表格97">
        <table:table-column table:style-name="表格97.A"/>
        <text:soft-page-break/>
        <table:table-row table:style-name="表格97.1">
          <table:table-cell table:style-name="表格97.A1" office:value-type="string">
            <text:p text:style-name="P135">✅ <text:s/>最常見錯誤</text:p>
            <text:p text:style-name="P120"><text:span text:style-name="T16">看到刪除就去找 Borrow！</text:span><text:span text:style-name="T63">其實刪完若還有 key，直接結束。</text:span><text:span text:style-name="T74">Case 1 是最常見的情況。</text:span></text:p>
          </table:table-cell>
        </table:table-row>
      </table:table>
      <text:p text:style-name="P118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136">刪除 2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27">判斷點</text:p>
          </table:table-cell>
          <table:table-cell table:style-name="表格99.A1" office:value-type="string">
            <text:p text:style-name="P27">結果</text:p>
          </table:table-cell>
        </table:table-row>
        <table:table-row table:style-name="表格99.1">
          <table:table-cell table:style-name="表格99.A2" office:value-type="string">
            <text:p text:style-name="P125">80 是葉節點嗎？</text:p>
          </table:table-cell>
          <table:table-cell table:style-name="表格99.A2" office:value-type="string">
            <text:p text:style-name="P108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125">做法</text:p>
          </table:table-cell>
          <table:table-cell table:style-name="表格99.A3" office:value-type="string">
            <text:p text:style-name="P76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125">後繼（Successor）</text:p>
          </table:table-cell>
          <table:table-cell table:style-name="表格99.A2" office:value-type="string">
            <text:p text:style-name="P116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125">Step A</text:p>
          </table:table-cell>
          <table:table-cell table:style-name="表格99.A3" office:value-type="string">
            <text:p text:style-name="P116">用 90 取代 80</text:p>
          </table:table-cell>
        </table:table-row>
        <table:table-row table:style-name="表格99.1">
          <table:table-cell table:style-name="表格99.A2" office:value-type="string">
            <text:p text:style-name="P125">Step B</text:p>
          </table:table-cell>
          <table:table-cell table:style-name="表格99.A2" office:value-type="string">
            <text:p text:style-name="P108"><text:span text:style-name="T37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125">結論</text:p>
          </table:table-cell>
          <table:table-cell table:style-name="表格99.A3" office:value-type="string">
            <text:p text:style-name="P108">完成，不需 Borrow 或 Merge</text:p>
          </table:table-cell>
        </table:table-row>
      </table:table>
      <text:p text:style-name="P118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36">刪除 80 後的最終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90] <text:s text:c="9"/></text:p>
            <text:p text:style-name="P52"><text:s text:c="15"/>/ <text:s text:c="2"/>\ <text:s text:c="9"/></text:p>
            <text:p text:style-name="P52"><text:s text:c="12"/>[70] <text:s/>[95] <text:s text:c="4"/>✅ </text:p>
          </table:table-cell>
        </table:table-row>
      </table:table>
      <text:p text:style-name="P118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142">⚠️ <text:s/>關於筆記中「方法 A / 方法 B 兩種都合法」的說明</text:p>
            <text:p text:style-name="P111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118"/>
      <text:h text:style-name="P100" text:outline-level="1">5.8 <text:s/>考場最終決策流程圖</text:h>
      <text:p text:style-name="P104">只要照著下面這張決策樹走，任何 2-3 Tree 刪除題都可以自行推導，不需死背範例。</text:p>
      <text:p text:style-name="P118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99">2-3 Tree 刪除決策樹</text:p>
            <text:p text:style-name="P131">1. <text:s/><text:span text:style-name="T68">要刪的 key 是葉節點嗎</text:span><text:span text:style-name="T90">？</text:span></text:p>
            <text:p text:style-name="P111"><text:s text:c="4"/><text:span text:style-name="T64">否 → 找後繼</text:span>（<text:span text:style-name="T9">右子樹最小值</text:span>）<text:span text:style-name="T64">或前驅</text:span>（<text:span text:style-name="T20">左子樹最大值</text:span>），用它取代，再去葉節點刪它，轉 Step 2</text:p>
            <text:p text:style-name="P114"><text:s text:c="4"/><text:span text:style-name="T97">是 → 直接刪</text:span>，轉 Step 2</text:p>
            <text:p text:style-name="P132">2. <text:span text:style-name="T90"><text:s/>刪完後節點還有 key 嗎？</text:span></text:p>
            <text:p text:style-name="P137"><text:s text:c="4"/><text:span text:style-name="T64">是（還有 ≥ 1 個 key）</text:span>→ 結束 ✅</text:p>
            <text:p text:style-name="P114"><text:s text:c="4"/>否（空節點）→ 轉 Step 3</text:p>
            <text:p text:style-name="P132">3. <text:s/><text:span text:style-name="T90">兄弟有 ≥ 2 個 key 嗎？</text:span>（<text:span text:style-name="T25">優先看左兄弟，再看右兄弟</text:span>）</text:p>
            <text:p text:style-name="P115"><text:s text:c="4"/><text:span text:style-name="T49">是 → Borrow（父下兄上）</text:span>：</text:p>
            <text:p text:style-name="P115"><text:s text:c="10"/>從<text:span text:style-name="T37">左</text:span>借：<text:span text:style-name="T37">左兄弟最大值上升</text:span>，<text:span text:style-name="T64">父 key 下降</text:span></text:p>
            <text:p text:style-name="P137"><text:s text:c="10"/>從<text:span text:style-name="T39">右</text:span>借：<text:span text:style-name="T39">右兄弟最小值上升</text:span>，<text:span text:style-name="T64">父 key 下降</text:span> <text:s/>→ 結束 ✅</text:p>
            <text:p text:style-name="P114"><text:s text:c="3"/><text:span text:style-name="T2"><text:s/>否</text:span> → <text:span text:style-name="T49">Merge</text:span>（<text:span text:style-name="T18">父 key 下降，與兄弟合併</text:span>）→ 轉 Step 4</text:p>
            <text:p text:style-name="P132">4. <text:span text:style-name="T90"><text:s/>Merge 後，父節點還有 key 嗎？</text:span></text:p>
            <text:p text:style-name="P137"><text:s text:c="4"/>是 → 結束 ✅</text:p>
            <text:p text:style-name="P141"><text:s text:c="4"/>否 → 父節點成為新的空節點，回到 Step 3（Cascade Merge）</text:p>
            <text:p text:style-name="P132">5. <text:s/><text:span text:style-name="T90">Cascade Merge 傳遞到 Root 了嗎？</text:span></text:p>
            <text:p text:style-name="P137"><text:s text:c="4"/>Root 仍有 key → 結束 ✅</text:p>
            <text:p text:style-name="P148"><text:s text:c="4"/>Root 空了 → <text:span text:style-name="T64">Root 消失，</text:span><text:span text:style-name="T39">下面那層升為新 Root</text:span><text:span text:style-name="T64">，樹高 - 1 </text:span>✅</text:p>
          </table:table-cell>
        </table:table-row>
      </table:table>
      <text:p text:style-name="P118"/>
      <text:h text:style-name="P100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8">口訣一：刪除本質</text:p>
            <text:p text:style-name="P103">插入太胖用 Split（中位數上推）；<text:span text:style-name="T21">刪除太瘦先 Borrow，借不到用 Merge</text:span></text:p>
          </table:table-cell>
        </table:table-row>
      </table:table>
      <text:p text:style-name="P118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98">口訣二：Borrow</text:p>
            <text:p text:style-name="P103">父下兄上 <text:s/>· <text:s/><text:span text:style-name="T12">從左借取最大值 <text:s/>· <text:s/>從右借取最小值</text:span></text:p>
          </table:table-cell>
        </table:table-row>
      </table:table>
      <text:p text:style-name="P118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98">口訣三：Merge</text:p>
            <text:p text:style-name="P103"><text:span text:style-name="T98">父 key 下降 + 與兄弟合體</text:span> <text:s/>· <text:s/>Merge 完問：父節點還有 key 嗎？</text:p>
          </table:table-cell>
        </table:table-row>
      </table:table>
      <text:p text:style-name="P118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98">口訣四：<text:span text:style-name="T99">內部節點</text:span></text:p>
            <text:p text:style-name="P103">先<text:span text:style-name="T101">找後繼（右子樹最小）或前驅（左子樹最大）當替身</text:span>，轉成葉節點刪除</text:p>
          </table:table-cell>
        </table:table-row>
      </table:table>
      <text:p text:style-name="P118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98">口訣五：Cascade Merge</text:p>
            <text:p text:style-name="P103"><text:soft-page-break/>合併後爸爸也破產 → 找爺爺幫忙 → 一路傳到 Root → Root 消失 →<text:span text:style-name="T102"> 樹高 -1</text:span></text:p>
          </table:table-cell>
        </table:table-row>
      </table:table>
      <text:p text:style-name="P118"/>
      <text:p text:style-name="P118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02">掌握本章你已超越附件原版第 5 章！</text:p>
            <text:p text:style-name="P109">原版只涵蓋約 40% 的考試需求；本章補全了：Underflow 概念、左借右借、兩種 Borrow、</text:p>
            <text:p text:style-name="P109">Cascade Merge、Root 消失、Successor / Predecessor 原理、完整決策流程圖。</text:p>
          </table:table-cell>
        </table:table-row>
      </table:table>
      <text:p text:style-name="P109">Cascade Merge、Root 消失、Successor / Predecessor 原理、完整決策流程圖。</text:p>
      <text:h text:style-name="P17" text:outline-level="1">第六章　2-3-4 Tree 與 (2,4)-Tree</text:h>
      <text:h text:style-name="P18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23">節點類型</text:p>
          </table:table-cell>
          <table:table-cell table:style-name="表格40.A1" office:value-type="string">
            <text:p text:style-name="P23">key 數</text:p>
          </table:table-cell>
          <table:table-cell table:style-name="表格40.A1" office:value-type="string">
            <text:p text:style-name="P23">children 數</text:p>
          </table:table-cell>
          <table:table-cell table:style-name="表格40.A1" office:value-type="string">
            <text:p text:style-name="P23"><text:span text:style-name="T25">key 的</text:span>外觀</text:p>
          </table:table-cell>
        </table:table-row>
        <table:table-row table:style-name="表格40.1">
          <table:table-cell table:style-name="表格40.A2" office:value-type="string">
            <text:p text:style-name="P46">2-node</text:p>
          </table:table-cell>
          <table:table-cell table:style-name="表格40.A2" office:value-type="string">
            <text:p text:style-name="P62">1</text:p>
          </table:table-cell>
          <table:table-cell table:style-name="表格40.A2" office:value-type="string">
            <text:p text:style-name="P63">2</text:p>
          </table:table-cell>
          <table:table-cell table:style-name="表格40.A2" office:value-type="string">
            <text:p text:style-name="P153">[50]</text:p>
          </table:table-cell>
        </table:table-row>
        <table:table-row table:style-name="表格40.1">
          <table:table-cell table:style-name="表格40.A3" office:value-type="string">
            <text:p text:style-name="P46">3-node</text:p>
          </table:table-cell>
          <table:table-cell table:style-name="表格40.A3" office:value-type="string">
            <text:p text:style-name="P62">2</text:p>
          </table:table-cell>
          <table:table-cell table:style-name="表格40.A3" office:value-type="string">
            <text:p text:style-name="P63">3</text:p>
          </table:table-cell>
          <table:table-cell table:style-name="表格40.A3" office:value-type="string">
            <text:p text:style-name="P153">[20|50]</text:p>
          </table:table-cell>
        </table:table-row>
        <table:table-row table:style-name="表格40.1">
          <table:table-cell table:style-name="表格40.A2" office:value-type="string">
            <text:p text:style-name="P46">4-node</text:p>
          </table:table-cell>
          <table:table-cell table:style-name="表格40.A2" office:value-type="string">
            <text:p text:style-name="P62">3</text:p>
          </table:table-cell>
          <table:table-cell table:style-name="表格40.A2" office:value-type="string">
            <text:p text:style-name="P63">4</text:p>
          </table:table-cell>
          <table:table-cell table:style-name="表格40.A2" office:value-type="string">
            <text:p text:style-name="P153">[20|50|80]</text:p>
          </table:table-cell>
        </table:table-row>
      </table:table>
      <text:p text:style-name="P69"><text:s/></text:p>
      <text:h text:style-name="P18" text:outline-level="2">6.2 為什麼叫 (2,4)-Tree？</text:h>
      <text:p text:style-name="P34">名稱來自<text:span text:style-name="T51">每個節點的 </text:span><text:span text:style-name="T92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5">children <text:span text:style-name="T2">最少</text:span><text:span text:style-name="T64"> = 2（2-node</text:span> 的情況）</text:p>
            <text:p text:style-name="P45">children <text:span text:style-name="T6">最多</text:span><text:span text:style-name="T104"> = 4（4-node</text:span> 的情況）</text:p>
            <text:p text:style-name="P78"/>
            <text:p text:style-name="P45">因此：<text:span text:style-name="T45">(2,4)-Tree(</text:span><text:span text:style-name="T100">(2,4)-Tree 其實就是 2-3-4 Tree 的另一種寫法</text:span><text:span text:style-name="T45">) = 2-3-4 Tree(</text:span><text:span text:style-name="T12">2-3-4 Tree 的節點可以有 2、3、4 個 children</text:span><text:span text:style-name="T45">) = B-Tree order 4</text:span></text:p>
          </table:table-cell>
        </table:table-row>
      </table:table>
      <text:p text:style-name="P66"><text:s/></text:p>
      <text:h text:style-name="P18" text:outline-level="2">6.3 插入規則（與 2-3 Tree 相同，只是容量多一格）</text:h>
      <text:p text:style-name="P34"><text:span text:style-name="T18">當節點滿（4 個 key，也就是 5 個 children）</text:span>時才 Overflow，執行 Split，中間 key 上推。</text:p>
      <text:p text:style-name="P66"><text:s/></text:p>
      <text:h text:style-name="P18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55">2-3 Tree vs 2-3-4 Tree</text:p>
            <text:p text:style-name="P35">2-3 Tree：<text:span text:style-name="T2">每節點</text:span><text:span text:style-name="T49">最多</text:span> 2 個 key，較常分裂</text:p>
            <text:p text:style-name="P35">2-3-4 Tree：<text:span text:style-name="T2">每節點</text:span><text:span text:style-name="T49">最多</text:span> 3 個 key，分裂次數較少</text:p>
            <text:p text:style-name="P35">2-3-4 Tree 的優點：插入效率更高</text:p>
            <text:p text:style-name="P35">2-3-4 Tree 的缺點：節點空間稍浪費（不一定填滿）</text:p>
            <text:p text:style-name="P35">最重要的是：<text:span text:style-name="T37">2-3-4 Tree 是 Red-Black Tree 的理論基礎</text:span></text:p>
          </table:table-cell>
        </table:table-row>
      </table:table>
      <text:p text:style-name="Standard"/>
      <text:h text:style-name="P17" text:outline-level="1">第七章　Red-Black Tree 與 2-3-4 Tree 對應</text:h>
      <text:h text:style-name="P18" text:outline-level="2">7.1 <text:span text:style-name="T25">為什麼發明 Red-Black Tree？</text:span></text:h>
      <text:p text:style-name="P34">2-3-4 <text:span text:style-name="T105">Tree 概念好但難實作</text:span>（<text:span text:style-name="T49">一個節點要存 1~3 個 key</text:span>，<text:span text:style-name="T2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3">Red-Black Tree 的核心思想</text:p>
            <text:p text:style-name="P35">我<text:span text:style-name="T37">還是用二元樹（每個節點只存 1 個 key）</text:span></text:p>
            <text:p text:style-name="P35">但我<text:span text:style-name="T9">用「顏色（紅/黑）」來標記節點之間的關係</text:span></text:p>
            <text:p text:style-name="P70">紅色節點 = 和父節點「邏輯上是同一個 2-3-4 Tree 節點」</text:p>
          </table:table-cell>
        </table:table-row>
      </table:table>
      <text:p text:style-name="P69"><text:s/></text:p>
      <text:h text:style-name="P18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23">2-3-4 Tree 節點</text:p>
          </table:table-cell>
          <table:table-cell table:style-name="表格44.A1" office:value-type="string">
            <text:p text:style-name="P23">包含 key</text:p>
          </table:table-cell>
          <table:table-cell table:style-name="表格44.A1" office:value-type="string">
            <text:p text:style-name="P23">Red-Black Tree 表示</text:p>
          </table:table-cell>
        </table:table-row>
        <table:table-row table:style-name="表格44.1">
          <table:table-cell table:style-name="表格44.A2" office:value-type="string">
            <text:p text:style-name="P46">2-node</text:p>
          </table:table-cell>
          <table:table-cell table:style-name="表格44.A2" office:value-type="string">
            <text:p text:style-name="P61">[50]</text:p>
          </table:table-cell>
          <table:table-cell table:style-name="表格44.A2" office:value-type="string">
            <text:p text:style-name="P65">50(黑)</text:p>
          </table:table-cell>
        </table:table-row>
        <table:table-row table:style-name="表格44.1">
          <table:table-cell table:style-name="表格44.A3" office:value-type="string">
            <text:p text:style-name="P46">3-node（左紅）</text:p>
          </table:table-cell>
          <table:table-cell table:style-name="表格44.A3" office:value-type="string">
            <text:p text:style-name="P46">[20<text:span text:style-name="T64">|50]</text:span></text:p>
          </table:table-cell>
          <table:table-cell table:style-name="表格44.A3" office:value-type="string">
            <text:p text:style-name="P65">50(黑) 左子 20(紅)</text:p>
          </table:table-cell>
        </table:table-row>
        <table:table-row table:style-name="表格44.1">
          <table:table-cell table:style-name="表格44.A2" office:value-type="string">
            <text:p text:style-name="P46">3-node（右紅）</text:p>
          </table:table-cell>
          <table:table-cell table:style-name="表格44.A2" office:value-type="string">
            <text:p text:style-name="P46"><text:span text:style-name="T64">[20|</text:span>50]</text:p>
          </table:table-cell>
          <table:table-cell table:style-name="表格44.A2" office:value-type="string">
            <text:p text:style-name="P65">20(黑) 右子 50(紅)</text:p>
          </table:table-cell>
        </table:table-row>
        <table:table-row table:style-name="表格44.1">
          <table:table-cell table:style-name="表格44.A3" office:value-type="string">
            <text:p text:style-name="P46">4-node</text:p>
          </table:table-cell>
          <table:table-cell table:style-name="表格44.A3" office:value-type="string">
            <text:p text:style-name="P46">[20<text:span text:style-name="T64">|50|</text:span>80]</text:p>
          </table:table-cell>
          <table:table-cell table:style-name="表格44.A3" office:value-type="string">
            <text:p text:style-name="P65">50(黑) 左子20(紅) 右子80(紅)</text:p>
          </table:table-cell>
        </table:table-row>
      </table:table>
      <text:p text:style-name="P66"><text:s/></text:p>
      <text:p text:style-name="P34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5">2-3-4 Tree： <text:s/>[20 | 50 | 80]</text:p>
            <text:p text:style-name="P78"/>
            <text:p text:style-name="P45">Red-Black Tree：</text:p>
            <text:p text:style-name="P45"><text:s text:c="10"/>50(黑)</text:p>
            <text:p text:style-name="P45"><text:s text:c="9"/>/ <text:s text:c="5"/>\</text:p>
            <text:p text:style-name="P45"><text:s text:c="7"/>20(紅) <text:s text:c="2"/>80(紅)</text:p>
          </table:table-cell>
        </table:table-row>
      </table:table>
      <text:p text:style-name="P66"><text:s/></text:p>
      <text:h text:style-name="P21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2">⚠️ 常見誤解：「黑色節點 = 獨立節點」</text:p>
            <text:p text:style-name="P42">很多教材直接說「黑色節點 = 獨立節點」，這句話不夠精確，考試時容易踩坑。</text:p>
            <text:p text:style-name="P156"/>
            <text:p text:style-name="P42">反例：4-node [20|40|60] 對應的 Red-Black Tree 是：</text:p>
            <text:p text:style-name="P42"><text:s text:c="8"/>40(黑)</text:p>
            <text:p text:style-name="P42"><text:s text:c="7"/>/ <text:s text:c="3"/>\</text:p>
            <text:p text:style-name="P42"><text:s text:c="3"/>20(紅) <text:s/>60(紅)</text:p>
            <text:p text:style-name="P156"/>
            <text:p text:style-name="P42">如果說「40(黑) 是獨立節點」，就錯了。</text:p>
            <text:p text:style-name="P42">因為<text:span text:style-name="T49"> 40(黑)、20(紅)、60(紅) 三個節點合在一起才代表同一個 4-node</text:span>。</text:p>
            <text:p text:style-name="P42"><text:span text:style-name="T18">40(黑) 不是獨立的，它是這個 4-node 的「核心代表」</text:span>。</text:p>
          </table:table-cell>
        </table:table-row>
      </table:table>
      <text:p text:style-name="P157"><text:s/></text:p>
      <text:p text:style-name="P8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26">顏色</text:p>
          </table:table-cell>
          <table:table-cell table:style-name="表格110.A1" office:value-type="string">
            <text:p text:style-name="P26">精確定義</text:p>
          </table:table-cell>
          <table:table-cell table:style-name="表格110.A1" office:value-type="string">
            <text:p text:style-name="P26">白話記憶</text:p>
          </table:table-cell>
        </table:table-row>
        <table:table-row table:style-name="表格110.1">
          <table:table-cell table:style-name="表格110.A2" office:value-type="string">
            <text:p text:style-name="P54">紅色節點</text:p>
          </table:table-cell>
          <table:table-cell table:style-name="表格110.A2" office:value-type="string">
            <text:p text:style-name="P54">與黑色父節點同屬一個 2-3-4 Tree 節點</text:p>
          </table:table-cell>
          <table:table-cell table:style-name="表格110.A2" office:value-type="string">
            <text:p text:style-name="P88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54">黑色節點</text:p>
          </table:table-cell>
          <table:table-cell table:style-name="表格110.A3" office:value-type="string">
            <text:p text:style-name="P54">該 2-3-4 Tree 節點的核心代表節點</text:p>
          </table:table-cell>
          <table:table-cell table:style-name="表格110.A3" office:value-type="string">
            <text:p text:style-name="P160">每個 2-3-4 節點的主節點</text:p>
          </table:table-cell>
        </table:table-row>
      </table:table>
      <text:p text:style-name="P157"><text:s/></text:p>
      <text:h text:style-name="P6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55">── <text:span text:style-name="T3">2-node</text:span> ──────────────────────────────────────────</text:p>
            <text:p text:style-name="P55">2-3-4 Tree：<text:span text:style-name="T2">[50]</text:span></text:p>
            <text:p text:style-name="P55">RB Tree： <text:s text:c="2"/>50(黑)</text:p>
            <text:p text:style-name="P55">解讀：只有一個 key，黑色節點單獨代表整個節點</text:p>
            <text:p text:style-name="P158"/>
            <text:p text:style-name="P55">── <text:span text:style-name="T3">3-node</text:span> ──────────────────────────────────────────</text:p>
            <text:p text:style-name="P55">2-3-4 Tree：<text:span text:style-name="T2">[30 | 50]</text:span></text:p>
            <text:p text:style-name="P55">RB Tree（其中一種）：</text:p>
            <text:p text:style-name="P55"><text:s text:c="11"/><text:span text:style-name="T106">50(黑)</text:span></text:p>
            <text:p text:style-name="P55"><text:s text:c="10"/>/</text:p>
            <text:p text:style-name="P55"><text:s text:c="7"/><text:span text:style-name="T107">30(紅)</text:span></text:p>
            <text:p text:style-name="P55">解讀：30(紅) 黏在 50(黑) 上，兩者合起來 = [30|50]</text:p>
            <text:p text:style-name="P55"><text:s text:c="6"/>50(黑) 不是「獨立」的，它和 30(紅) 是一組</text:p>
            <text:p text:style-name="P158"/>
            <text:p text:style-name="P55">── <text:span text:style-name="T3">4-node</text:span> ──────────────────────────────────────────</text:p>
            <text:p text:style-name="P55">2-3-4 Tree：<text:span text:style-name="T2">[20 | 40 | 60]</text:span></text:p>
            <text:p text:style-name="P55">RB Tree：</text:p>
            <text:p text:style-name="P55"><text:s text:c="11"/><text:span text:style-name="T106">40(黑)</text:span></text:p>
            <text:p text:style-name="P55"><text:s text:c="10"/>/ <text:s text:c="3"/>\</text:p>
            <text:p text:style-name="P55"><text:s text:c="7"/><text:span text:style-name="T107">20(紅) <text:s/>60(紅)</text:span></text:p>
            <text:p text:style-name="P55">解讀：三個節點合起來 = [20|40|60]</text:p>
            <text:p text:style-name="P55"><text:s text:c="6"/>40(黑) 是核心代表，20(紅) 和 60(紅) 是額外的 key</text:p>
          </table:table-cell>
        </table:table-row>
      </table:table>
      <text:p text:style-name="P157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31">考試最精確的一句話</text:p>
            <text:p text:style-name="P72">Red-Black Tree 可視為 2-3-4 Tree 的二元樹表示法。</text:p>
            <text:p text:style-name="P154">紅色節點代表它與黑色父節點共同構成同一個 2-3-4 Tree 節點；</text:p>
            <text:p text:style-name="P162">黑色節點是每個 2-3-4 Tree 節點的核心代表。</text:p>
          </table:table-cell>
        </table:table-row>
      </table:table>
      <text:p text:style-name="P159"/>
      <text:h text:style-name="P18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23">規則編號</text:p>
          </table:table-cell>
          <table:table-cell table:style-name="表格46.A1" office:value-type="string">
            <text:p text:style-name="P23">規則內容</text:p>
          </table:table-cell>
        </table:table-row>
        <table:table-row table:style-name="表格46.1">
          <table:table-cell table:style-name="表格46.A2" office:value-type="string">
            <text:p text:style-name="P46">Rule 1</text:p>
          </table:table-cell>
          <table:table-cell table:style-name="表格46.A2" office:value-type="string">
            <text:p text:style-name="P46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46">Rule 2</text:p>
          </table:table-cell>
          <table:table-cell table:style-name="表格46.A3" office:value-type="string">
            <text:p text:style-name="P163">根（root）一定是黑色</text:p>
          </table:table-cell>
        </table:table-row>
        <table:table-row table:style-name="表格46.1">
          <table:table-cell table:style-name="表格46.A2" office:value-type="string">
            <text:p text:style-name="P46">Rule 3</text:p>
          </table:table-cell>
          <table:table-cell table:style-name="表格46.A2" office:value-type="string">
            <text:p text:style-name="P163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46">Rule 4</text:p>
          </table:table-cell>
          <table:table-cell table:style-name="表格46.A3" office:value-type="string">
            <text:p text:style-name="P46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46">Rule 5</text:p>
          </table:table-cell>
          <table:table-cell table:style-name="表格46.A2" office:value-type="string">
            <text:p text:style-name="P46"><text:span text:style-name="T42">任意節點到其葉節點的所有路徑</text:span>，<text:span text:style-name="T37">黑色節點數相同</text:span>（<text:span text:style-name="T45">Black Height 相等</text:span>）</text:p>
          </table:table-cell>
        </table:table-row>
      </table:table>
      <text:p text:style-name="P66"><text:soft-page-break/><text:s/></text:p>
      <text:p text:style-name="P68"><text:span text:style-name="T28">Rule 5 是關鍵</text:span><text:span text:style-name="T27">：</text:span><text:span text:style-name="T83">這條規則</text:span><text:span text:style-name="T22">對應到 2-3-4 Tree 所有葉節點深度相同</text:span><text:span text:style-name="T31">，確保 Red-Black Tree 保持平衡。</text:span></text:p>
      <text:p text:style-name="P66"><text:s/></text:p>
      <text:h text:style-name="P18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11">AVL Tree</text:p>
            <text:list text:style-name="WWNum2">
              <text:list-item text:start-value="1">
                <text:p text:style-name="P171">平衡要求嚴格（左右高度差 ≤ 1）</text:p>
              </text:list-item>
              <text:list-item>
                <text:p text:style-name="P171">搜尋速度最快</text:p>
              </text:list-item>
              <text:list-item>
                <text:p text:style-name="P171">插入/刪除時旋轉次數多</text:p>
              </text:list-item>
              <text:list-item>
                <text:p text:style-name="P171"><text:span text:style-name="T49">適合搜尋頻繁</text:span>的場合資料</text:p>
              </text:list-item>
            </text:list>
          </table:table-cell>
          <table:table-cell table:style-name="表格47.B1" office:value-type="string">
            <text:p text:style-name="P144">Red-Black Tree</text:p>
            <text:list text:continue-numbering="true" text:style-name="WWNum2">
              <text:list-item>
                <text:p text:style-name="P171">平衡要求較寬鬆（<text:span text:style-name="T13">最長路徑 ≤ 最短路徑 2 倍</text:span>）</text:p>
              </text:list-item>
              <text:list-item>
                <text:p text:style-name="P171">樹高通常比 AVL 高（搜尋仍為 O(log n)）</text:p>
              </text:list-item>
              <text:list-item>
                <text:p text:style-name="P171">插入、刪除通常需要較少旋轉</text:p>
              </text:list-item>
              <text:list-item>
                <text:p text:style-name="P171"><text:span text:style-name="T37">適合插入/刪除頻繁</text:span>的場合資料</text:p>
              </text:list-item>
            </text:list>
          </table:table-cell>
        </table:table-row>
      </table:table>
      <text:p text:style-name="P69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9">實務應用（必記）</text:p>
            <text:p text:style-name="P35">Linux Kernel（排程器）→ Red-Black Tree</text:p>
            <text:p text:style-name="P35">Java TreeMap / TreeSet → Red-Black Tree</text:p>
            <text:p text:style-name="P35">C++ std::map / std::set → Red-Black Tree</text:p>
            <text:p text:style-name="P35">資料庫索引 → B-Tree（磁碟儲存）</text:p>
          </table:table-cell>
        </table:table-row>
      </table:table>
      <text:p text:style-name="Standard"/>
      <text:h text:style-name="P17" text:outline-level="1">第八章　B-Tree order 3 插入完整範例（114高Q1）</text:h>
      <text:p text:style-name="P34">B-Tree order 3 = 2-3 Tree。本章補足圖片中未完整解說的考題。</text:p>
      <text:p text:style-name="P34">插入順序：10, 80, 2, 9, 45, 62</text:p>
      <text:p text:style-name="P66"><text:s/></text:p>
      <text:h text:style-name="P5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5">[10]</text:p>
          </table:table-cell>
        </table:table-row>
      </table:table>
      <text:h text:style-name="P5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5">[10 | 80] <text:s text:c="3"/>← <text:span text:style-name="T2">合法</text:span>（2 個 key，<text:span text:style-name="T67">order 3 最多 2 key</text:span>）</text:p>
          </table:table-cell>
        </table:table-row>
      </table:table>
      <text:h text:style-name="P5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5">插入後：[2 | 10 | 80] <text:s text:c="2"/>← <text:span text:style-name="T14">3 個 key！Overflow！</text:span></text:p>
            <text:p text:style-name="P78"/>
            <text:p text:style-name="P45">Split：中間值 10 上推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3"/>[2] <text:s text:c="2"/>[80]</text:p>
          </table:table-cell>
        </table:table-row>
      </table:table>
      <text:h text:style-name="P5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5">9 &lt; 10 → 往左子樹</text:p>
            <text:p text:style-name="P45">左子：[2] → 插入 9 → <text:span text:style-name="T6">[2 | 9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<text:span text:style-name="T2">[2|9]</text:span> <text:s/>[80]</text:p>
          </table:table-cell>
        </table:table-row>
      </table:table>
      <text:h text:style-name="P5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5">45 &gt; 10 → 往右子樹</text:p>
            <text:p text:style-name="P45">右子：[80] → 插入 45 → <text:span text:style-name="T6">[45 | 80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[2|9] <text:s/><text:span text:style-name="T2">[45|80]</text:span></text:p>
          </table:table-cell>
        </table:table-row>
      </table:table>
      <text:h text:style-name="P5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45">62 &gt; 10 → 往右子樹</text:p>
            <text:p text:style-name="P45">右子：[45 | 80] → 插入 62 → <text:span text:style-name="T14">[45 | 62 | 80] <text:s text:c="2"/>← Overflow！</text:span></text:p>
            <text:p text:style-name="P78"/>
            <text:p text:style-name="P45">Split：<text:span text:style-name="T49">中間值 62 上推至根 [10]</text:span></text:p>
            <text:p text:style-name="P45">根變：<text:span text:style-name="T19">[10 | 62] <text:s text:c="2"/>← 合法！</text:span></text:p>
            <text:p text:style-name="P78"><text:soft-page-break/></text:p>
            <text:p text:style-name="P45">最終樹：</text:p>
            <text:p text:style-name="P45"><text:s text:c="9"/>[10 | 62]</text:p>
            <text:p text:style-name="P45"><text:s text:c="8"/>/ <text:s text:c="3"/>| <text:s text:c="4"/>\</text:p>
            <text:p text:style-name="P45"><text:s text:c="5"/>[2|9] <text:s/>[45] <text:s/>[80] <text:s text:c="3"/>✅ 完成！</text:p>
          </table:table-cell>
        </table:table-row>
      </table:table>
      <text:p text:style-name="P66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96">114高Q1 答案驗證</text:p>
            <text:p text:style-name="P35">圖片中記載：root=[10,62]，葉=[2,9],[45],[80]</text:p>
            <text:p text:style-name="P35">與上述推導完全一致。</text:p>
          </table:table-cell>
        </table:table-row>
      </table:table>
      <text:p text:style-name="Standard"/>
      <text:h text:style-name="P17" text:outline-level="1">第九章　AVL Tree 補充說明</text:h>
      <text:h text:style-name="P18" text:outline-level="2">9.1 AVL Tree 的平衡條件</text:h>
      <text:p text:style-name="P34">AVL Tree 規定：每個節點的「平衡因子（Balance Factor）= 左子樹高度 - 右子樹高度」必須在 -1, 0, 1 之內。</text:p>
      <text:p text:style-name="P66"><text:s/></text:p>
      <text:h text:style-name="P18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23">旋轉類型</text:p>
          </table:table-cell>
          <table:table-cell table:style-name="表格56.A1" office:value-type="string">
            <text:p text:style-name="P23">失衡描述</text:p>
          </table:table-cell>
          <table:table-cell table:style-name="表格56.A1" office:value-type="string">
            <text:p text:style-name="P23">旋轉方式</text:p>
          </table:table-cell>
        </table:table-row>
        <table:table-row table:style-name="表格56.1">
          <table:table-cell table:style-name="表格56.A2" office:value-type="string">
            <text:p text:style-name="P46">LL Rotation</text:p>
          </table:table-cell>
          <table:table-cell table:style-name="表格56.A2" office:value-type="string">
            <text:p text:style-name="P46">左子樹的左邊太高</text:p>
          </table:table-cell>
          <table:table-cell table:style-name="表格56.A2" office:value-type="string">
            <text:p text:style-name="P46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46">RR Rotation</text:p>
          </table:table-cell>
          <table:table-cell table:style-name="表格56.A3" office:value-type="string">
            <text:p text:style-name="P46">右子樹的右邊太高</text:p>
          </table:table-cell>
          <table:table-cell table:style-name="表格56.A3" office:value-type="string">
            <text:p text:style-name="P46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46">LR Rotation</text:p>
          </table:table-cell>
          <table:table-cell table:style-name="表格56.A2" office:value-type="string">
            <text:p text:style-name="P46">左子樹的右邊太高</text:p>
          </table:table-cell>
          <table:table-cell table:style-name="表格56.A2" office:value-type="string">
            <text:p text:style-name="P46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46">RL Rotation</text:p>
          </table:table-cell>
          <table:table-cell table:style-name="表格56.A3" office:value-type="string">
            <text:p text:style-name="P46">右子樹的左邊太高</text:p>
          </table:table-cell>
          <table:table-cell table:style-name="表格56.A3" office:value-type="string">
            <text:p text:style-name="P46">先對右子右旋，再對根左旋</text:p>
          </table:table-cell>
        </table:table-row>
      </table:table>
      <text:p text:style-name="P69"><text:s/></text:p>
      <text:h text:style-name="P18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5">AVL Tree 維持平衡的方式：旋轉（Rotate）</text:p>
            <text:p text:style-name="P45">B-Tree <text:s/>維持平衡的方式：分裂（Split）+ 合併（Merge）</text:p>
            <text:p text:style-name="P78"/>
            <text:p text:style-name="P45">這是公職考試最常考的比較題！</text:p>
          </table:table-cell>
        </table:table-row>
      </table:table>
      <text:p text:style-name="Standard"/>
      <text:h text:style-name="P17" text:outline-level="1">第十章　考試速查表（最終記憶版）</text:h>
      <text:h text:style-name="P18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23">公式</text:p>
          </table:table-cell>
          <table:table-cell table:style-name="表格58.A1" office:value-type="string">
            <text:p text:style-name="P23">說明</text:p>
          </table:table-cell>
        </table:table-row>
        <table:table-row table:style-name="表格58.1">
          <table:table-cell table:style-name="表格58.A2" office:value-type="string">
            <text:p text:style-name="P164">children 數 = key 數 + 1</text:p>
          </table:table-cell>
          <table:table-cell table:style-name="表格58.A2" office:value-type="string">
            <text:p text:style-name="P161">任何節點皆適用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19">B-Tree order m</text:span> → <text:span text:style-name="T18">最多</text:span> <text:span text:style-name="T49">m-1 個 key</text:span></text:p>
          </table:table-cell>
          <table:table-cell table:style-name="表格58.A3" office:value-type="string">
            <text:p text:style-name="P46">order = children 上限</text:p>
          </table:table-cell>
        </table:table-row>
        <table:table-row table:style-name="表格58.1">
          <table:table-cell table:style-name="表格58.A2" office:value-type="string">
            <text:p text:style-name="P46"><text:span text:style-name="T45">非根節點最少</text:span> <text:span text:style-name="T37">key = ⌈m/2⌉ - 1</text:span></text:p>
          </table:table-cell>
          <table:table-cell table:style-name="表格58.A2" office:value-type="string">
            <text:p text:style-name="P46">必考！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45">非根節點最少</text:span> <text:span text:style-name="T37">children = ⌈m/2⌉</text:span></text:p>
          </table:table-cell>
          <table:table-cell table:style-name="表格58.A3" office:value-type="string">
            <text:p text:style-name="P63">等於 key+1</text:p>
          </table:table-cell>
        </table:table-row>
        <table:table-row table:style-name="表格58.1">
          <table:table-cell table:style-name="表格58.A2" office:value-type="string">
            <text:p text:style-name="P164">2-3-4 Tree = (2,4)-Tree = order 4</text:p>
          </table:table-cell>
          <table:table-cell table:style-name="表格58.A2" office:value-type="string">
            <text:p text:style-name="P46">必背等價關係</text:p>
          </table:table-cell>
        </table:table-row>
        <table:table-row table:style-name="表格58.1">
          <table:table-cell table:style-name="表格58.A3" office:value-type="string">
            <text:p text:style-name="P46">RB Tree 黑高度 = 2-3-4 Tree 高度</text:p>
          </table:table-cell>
          <table:table-cell table:style-name="表格58.A3" office:value-type="string">
            <text:p text:style-name="P46">對應關係核心</text:p>
          </table:table-cell>
        </table:table-row>
      </table:table>
      <text:p text:style-name="P69"><text:s/></text:p>
      <text:h text:style-name="P22" text:outline-level="2">10.1.1 深入理解：RB Tree 黑高度 = 2-3-4 Tree 高度</text:h>
      <text:p text:style-name="P165"><text:span text:style-name="T55">這句話是對的，但要加前提：</text:span><text:span text:style-name="T43">當 Red-Black Tree 視為 2-3-4 Tree 的二元樹表示法時</text:span><text:span text:style-name="T31">，</text:span><text:span text:style-name="T22">RB Tree 的黑高度（Black Height）完全對應 2-3-4 Tree 的高度</text:span><text:span text:style-name="T103">（層數）</text:span><text:span text:style-name="T31">。</text:span></text:p>
      <text:p text:style-name="P166"><text:s/></text:p>
      <text:h text:style-name="P7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2">黑高度定義</text:p>
            <text:p text:style-name="P43"><text:span text:style-name="T64">從某節點出發</text:span>，<text:span text:style-name="T9">往下走到 NULL 葉節點的路徑上</text:span>，</text:p>
            <text:p text:style-name="P43"><text:span text:style-name="T37">所經過的黑色節點數量</text:span>（<text:span text:style-name="T49">不含自己</text:span>，通常<text:span text:style-name="T18">含 NULL 節點</text:span>）。</text:p>
            <text:p text:style-name="P167"/>
            <text:p text:style-name="P43">例如：</text:p>
            <text:p text:style-name="P43"><text:s text:c="8"/>20(黑)</text:p>
            <text:p text:style-name="P43"><text:s text:c="7"/>/ <text:s text:c="4"/>\</text:p>
            <text:p text:style-name="P43"><text:s text:c="3"/>10(黑) <text:s text:c="2"/>30(黑)</text:p>
            <text:p text:style-name="P167"/>
            <text:p text:style-name="P43">從根 20(黑) 出發：路徑 20 → 10(黑) → NULL(黑)</text:p>
            <text:p text:style-name="P43">黑節點數（不含 20 自己）= 10(黑) + NULL(黑) = 2</text:p>
            <text:p text:style-name="P43">所以 bh(根) = 2</text:p>
          </table:table-cell>
        </table:table-row>
      </table:table>
      <text:p text:style-name="P166"><text:s/></text:p>
      <text:h text:style-name="P7" text:outline-level="3">為什麼黑高度 = 2-3-4 Tree 高度？</text:h>
      <text:p text:style-name="P44">關鍵：<text:span text:style-name="T49">紅色節點不計入黑高度</text:span>。所以<text:span text:style-name="T2">不管一個 2-3-4 Tree 節點被拆成幾個 RB Tree 節點</text:span>，<text:span text:style-name="T37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56">2-3-4 Tree 的 <text:span text:style-name="T2">2-node：[50]</text:span></text:p>
            <text:p text:style-name="P56"><text:s text:c="2"/>→ <text:span text:style-name="T3">RB Tree：50(黑)</text:span></text:p>
            <text:p text:style-name="P56"><text:s text:c="2"/><text:span text:style-name="T19">黑高度貢獻：+1</text:span></text:p>
            <text:p text:style-name="P168"/>
            <text:p text:style-name="P56">2-3-4 Tree 的 <text:span text:style-name="T2">3-node：[20|50]</text:span></text:p>
            <text:p text:style-name="P168"><text:soft-page-break/><text:span text:style-name="T34"><text:s text:c="2"/>→ </text:span><text:span text:style-name="T36">RB Tree：50(黑) + 20(紅)</text:span></text:p>
            <text:p text:style-name="P57"><text:s/><text:span text:style-name="T7"><text:s/></text:span><text:span text:style-name="T19">黑高度貢獻：+1</text:span>（<text:span text:style-name="T49">紅色的 20 不算</text:span>）</text:p>
            <text:p text:style-name="P168"/>
            <text:p text:style-name="P56">2-3-4 Tree 的 <text:span text:style-name="T2">4-node：[20|50|80]</text:span></text:p>
            <text:p text:style-name="P56"><text:s text:c="2"/>→ <text:span text:style-name="T3">RB Tree：20(紅) + 50(黑) + 80(紅)</text:span></text:p>
            <text:p text:style-name="P56"><text:s text:c="2"/><text:span text:style-name="T19">黑高度貢獻：+1</text:span>（<text:span text:style-name="T49">兩個紅色都不算</text:span>）</text:p>
            <text:p text:style-name="P168"/>
            <text:p text:style-name="P56">結論：<text:span text:style-name="T2">不管是 2-node、3-node 還是 4-node</text:span>，</text:p>
            <text:p text:style-name="P56"><text:s text:c="6"/><text:span text:style-name="T18">每一層 2-3-4 Tree 節點只讓 RB Tree 黑高度增加 1。</text:span></text:p>
            <text:p text:style-name="P56"><text:s text:c="6"/>∴ <text:span text:style-name="T37">RB Tree 黑高度 = 2-3-4 Tree 高度</text:span></text:p>
          </table:table-cell>
        </table:table-row>
      </table:table>
      <text:p text:style-name="P166"><text:s/></text:p>
      <text:h text:style-name="P7" text:outline-level="3">這有什麼用？→ <text:span text:style-name="T25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6"><text:span text:style-name="T46">RB Tree 的規則</text:span>：紅色節點的子節點必須是黑色</text:p>
            <text:p text:style-name="P56">（<text:span text:style-name="T108">不能有連續兩個紅色節點</text:span>）</text:p>
            <text:p text:style-name="P168"/>
            <text:p text:style-name="P56">因此<text:span text:style-name="T2">最長路徑頂多是</text:span>：<text:span text:style-name="T109">黑、紅、黑、紅、黑…</text:span>交替</text:p>
            <text:p text:style-name="P170">最長路徑 ≤ 2 × 黑高度</text:p>
            <text:p text:style-name="P168"/>
            <text:p text:style-name="P56">又因為 <text:span text:style-name="T37">黑高度 = 2-3-4 Tree 高度</text:span> = <text:span text:style-name="T18">O(log n)</text:span></text:p>
            <text:p text:style-name="P168"/>
            <text:p text:style-name="P56">所以：<text:span text:style-name="T41">h ≤ 2 × bh</text:span> = <text:span text:style-name="T2">2 × O(log n)</text:span> = O(log n)</text:p>
            <text:p text:style-name="P56"><text:s text:c="6"/>∴ <text:span text:style-name="T19">RB Tree 的搜尋、插入、刪除均為</text:span> <text:span text:style-name="T2">O(log n)</text:span> <text:s/>✅</text:p>
          </table:table-cell>
        </table:table-row>
      </table:table>
      <text:p text:style-name="P166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2">考試最重要的一句話</text:p>
            <text:p text:style-name="P73">2-3-4 Tree 的每一層 <text:s/>⟺ <text:s/>RB Tree 的一個黑節點層</text:p>
            <text:p text:style-name="P43">因此：<text:span text:style-name="T10">RB Tree 黑高度 ≈ 2-3-4 Tree 高度</text:span></text:p>
            <text:p text:style-name="P43">推論：<text:span text:style-name="T41">RB Tree 最長路徑 ≤ 2 × 黑高度</text:span> → <text:span text:style-name="T92">高度 O(log n)</text:span></text:p>
          </table:table-cell>
        </table:table-row>
      </table:table>
      <text:p text:style-name="P169"/>
      <text:h text:style-name="P18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23">2-3-4 Tree 節點</text:p>
          </table:table-cell>
          <table:table-cell table:style-name="表格59.A1" office:value-type="string">
            <text:p text:style-name="P23">key 數</text:p>
          </table:table-cell>
          <table:table-cell table:style-name="表格59.A1" office:value-type="string">
            <text:p text:style-name="P23">Red-Black Tree</text:p>
          </table:table-cell>
          <table:table-cell table:style-name="表格59.A1" office:value-type="string">
            <text:p text:style-name="P23">備註</text:p>
          </table:table-cell>
        </table:table-row>
        <table:table-row table:style-name="表格59.1">
          <table:table-cell table:style-name="表格59.A2" office:value-type="string">
            <text:p text:style-name="P46">2-node</text:p>
          </table:table-cell>
          <table:table-cell table:style-name="表格59.A2" office:value-type="string">
            <text:p text:style-name="P63">[50]</text:p>
          </table:table-cell>
          <table:table-cell table:style-name="表格59.A2" office:value-type="string">
            <text:p text:style-name="P64">50(黑)</text:p>
          </table:table-cell>
          <table:table-cell table:style-name="表格59.A2" office:value-type="string">
            <text:p text:style-name="P46">最簡單</text:p>
          </table:table-cell>
        </table:table-row>
        <table:table-row table:style-name="表格59.1">
          <table:table-cell table:style-name="表格59.A3" office:value-type="string">
            <text:p text:style-name="P46">3-node</text:p>
          </table:table-cell>
          <table:table-cell table:style-name="表格59.A3" office:value-type="string">
            <text:p text:style-name="P63">[20|50]</text:p>
          </table:table-cell>
          <table:table-cell table:style-name="表格59.A3" office:value-type="string">
            <text:p text:style-name="P46"><text:span text:style-name="T6">50(黑)</text:span>+<text:span text:style-name="T8">20(紅)</text:span></text:p>
          </table:table-cell>
          <table:table-cell table:style-name="表格59.A3" office:value-type="string">
            <text:p text:style-name="P150">紅節點在左或右均可</text:p>
          </table:table-cell>
        </table:table-row>
        <table:table-row table:style-name="表格59.1">
          <table:table-cell table:style-name="表格59.A2" office:value-type="string">
            <text:p text:style-name="P46">4-node</text:p>
          </table:table-cell>
          <table:table-cell table:style-name="表格59.A2" office:value-type="string">
            <text:p text:style-name="P63">[20|50|80]</text:p>
          </table:table-cell>
          <table:table-cell table:style-name="表格59.A2" office:value-type="string">
            <text:p text:style-name="P46"><text:span text:style-name="T8">20(紅)</text:span>+<text:span text:style-name="T6">50(黑)</text:span>+<text:span text:style-name="T8">80(紅)</text:span></text:p>
          </table:table-cell>
          <table:table-cell table:style-name="表格59.A2" office:value-type="string">
            <text:p text:style-name="P46">對稱結構</text:p>
          </table:table-cell>
        </table:table-row>
      </table:table>
      <text:p text:style-name="P69"><text:s/></text:p>
      <text:h text:style-name="P18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3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45">找到位置 → 插入</text:p>
                  <text:p text:style-name="P45"><text:soft-page-break/>↓</text:p>
                  <text:p text:style-name="P45">節點 key ≤ (m-1)？</text:p>
                  <text:p text:style-name="P45"><text:s text:c="2"/>是 → 結束</text:p>
                  <text:p text:style-name="P45"><text:s text:c="2"/>否（Overflow）→</text:p>
                  <text:p text:style-name="P45"><text:s text:c="4"/>中間 key 上推</text:p>
                  <text:p text:style-name="P45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4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45">找到並刪除</text:p>
                  <text:p text:style-name="P45"><text:soft-page-break/>↓</text:p>
                  <text:p text:style-name="P45">還有 key？</text:p>
                  <text:p text:style-name="P45"><text:s text:c="2"/>是 → 結束</text:p>
                  <text:p text:style-name="P45"><text:s text:c="2"/>否 →</text:p>
                  <text:p text:style-name="P45"><text:s text:c="4"/>能借（Borrow）？</text:p>
                  <text:p text:style-name="P45"><text:s text:c="6"/>是 → 父下兄上</text:p>
                  <text:p text:style-name="P45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69"><text:s/></text:p>
      <text:h text:style-name="P18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23">考試</text:p>
          </table:table-cell>
          <table:table-cell table:style-name="表格63.A1" office:value-type="string">
            <text:p text:style-name="P23">題號</text:p>
          </table:table-cell>
          <table:table-cell table:style-name="表格63.A1" office:value-type="string">
            <text:p text:style-name="P23">考點</text:p>
          </table:table-cell>
        </table:table-row>
        <table:table-row table:style-name="表格63.1">
          <table:table-cell table:style-name="表格63.A2" office:value-type="string">
            <text:p text:style-name="P46">111地特</text:p>
          </table:table-cell>
          <table:table-cell table:style-name="表格63.A2" office:value-type="string">
            <text:p text:style-name="P46">Q3</text:p>
          </table:table-cell>
          <table:table-cell table:style-name="表格63.A2" office:value-type="string">
            <text:p text:style-name="P46">2-3 Tree 插入/刪除</text:p>
          </table:table-cell>
        </table:table-row>
        <table:table-row table:style-name="表格63.1">
          <table:table-cell table:style-name="表格63.A3" office:value-type="string">
            <text:p text:style-name="P46">112高考</text:p>
          </table:table-cell>
          <table:table-cell table:style-name="表格63.A3" office:value-type="string">
            <text:p text:style-name="P46">Q4</text:p>
          </table:table-cell>
          <table:table-cell table:style-name="表格63.A3" office:value-type="string">
            <text:p text:style-name="P46">B-Tree 插入，2-3-4 Tree</text:p>
          </table:table-cell>
        </table:table-row>
        <table:table-row table:style-name="表格63.1">
          <table:table-cell table:style-name="表格63.A2" office:value-type="string">
            <text:p text:style-name="P46">113地特</text:p>
          </table:table-cell>
          <table:table-cell table:style-name="表格63.A2" office:value-type="string">
            <text:p text:style-name="P46">Q4</text:p>
          </table:table-cell>
          <table:table-cell table:style-name="表格63.A2" office:value-type="string">
            <text:p text:style-name="P46">B-Tree 性質，高度計算</text:p>
          </table:table-cell>
        </table:table-row>
        <table:table-row table:style-name="表格63.1">
          <table:table-cell table:style-name="表格63.A3" office:value-type="string">
            <text:p text:style-name="P46">114高考</text:p>
          </table:table-cell>
          <table:table-cell table:style-name="表格63.A3" office:value-type="string">
            <text:p text:style-name="P46">Q1</text:p>
          </table:table-cell>
          <table:table-cell table:style-name="表格63.A3" office:value-type="string">
            <text:p text:style-name="P46">B-Tree order 3 插入（10,80,2,9,45,62）</text:p>
          </table:table-cell>
        </table:table-row>
      </table:table>
      <text:p text:style-name="P69"><text:s/></text:p>
      <text:h text:style-name="P18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45"><text:span text:style-name="T2">BST（</text:span>最基礎，但<text:span text:style-name="T18">可能退化 O(n)</text:span>）</text:p>
            <text:p text:style-name="P45"><text:s text:c="2"/>│</text:p>
            <text:p text:style-name="P45"><text:s text:c="2"/>├── AVL Tree（<text:span text:style-name="T37">最嚴格</text:span>旋轉平衡）</text:p>
            <text:p text:style-name="P45"><text:s text:c="2"/>│</text:p>
            <text:p text:style-name="P45"><text:s text:c="2"/>└── m-way Search Tree</text:p>
            <text:p text:style-name="P45"><text:s text:c="7"/>│</text:p>
            <text:p text:style-name="P45"><text:s text:c="7"/>├── <text:span text:style-name="T37">2-3 Tree = B-Tree order 3</text:span></text:p>
            <text:p text:style-name="P45"><text:s text:c="7"/>│ <text:s text:c="4"/>插入：Split（中間key上推）</text:p>
            <text:p text:style-name="P45"><text:s text:c="7"/>│ <text:s text:c="4"/>刪除：Borrow / Merge</text:p>
            <text:p text:style-name="P45"><text:s text:c="7"/>│</text:p>
            <text:p text:style-name="P45"><text:s text:c="7"/>├── <text:span text:style-name="T37">2-3-4 Tree = B-Tree order 4 = (2,4)-Tree</text:span></text:p>
            <text:p text:style-name="P45"><text:s text:c="7"/>│ <text:s text:c="4"/>↕ <text:span text:style-name="T2">一一對應</text:span></text:p>
            <text:p text:style-name="P45"><text:s text:c="7"/>│ <text:s text:c="2"/><text:span text:style-name="T10">Red-Black Tree</text:span>（用二元樹+顏色表示的2-3-4 Tree）</text:p>
            <text:p text:style-name="P45"><text:s text:c="7"/>│</text:p>
            <text:p text:style-name="P45"><text:s text:c="7"/>└── B-Tree order m（資料庫最愛）</text:p>
            <text:p text:style-name="P45"><text:s text:c="13"/>高度極低，O(log n)，磁碟I/O最少</text:p>
          </table:table-cell>
        </table:table-row>
      </table:table>
      <text:p text:style-name="P69"><text:s/></text:p>
      <text:h text:style-name="P18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9">口訣一：插入</text:p>
            <text:p text:style-name="P35">Overflow → Split → 中間 key 上推 → 繼續往上</text:p>
          </table:table-cell>
        </table:table-row>
      </table:table>
      <text:p text:style-name="P66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43">口訣二：刪除<text:soft-page-break/></text:p>
            <text:p text:style-name="P35">空了 → 先試 Borrow（父下兄上）→ 借不了再 Merge</text:p>
          </table:table-cell>
        </table:table-row>
      </table:table>
      <text:p text:style-name="P66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55">口訣三：對應關係</text:p>
            <text:p text:style-name="P35">2-3-4 Tree = (2,4)-Tree = B-Tree order 4</text:p>
            <text:p text:style-name="P70">RB Tree 就是 2-3-4 Tree 的二元樹版本</text:p>
            <text:p text:style-name="P35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19</meta:editing-cycles>
    <meta:creation-date>2026-06-01T00:43:19.219000000</meta:creation-date>
    <dc:date>2026-06-26T08:18:16.693000000</dc:date>
    <meta:generator>MODA_ODF_Application_Tools/3.8.4.2$Windows_X86_64 LibreOffice_project/4fb77107d5af14329e08085efe4fa19b5633383a</meta:generator>
    <meta:editing-duration>P1DT2H53M33S</meta:editing-duration>
    <meta:document-statistic meta:table-count="116" meta:image-count="0" meta:object-count="0" meta:page-count="32" meta:paragraph-count="992" meta:word-count="8857" meta:character-count="19253" meta:non-whitespace-character-count="14066"/>
  </office:meta>
</office:document-meta>
</file>