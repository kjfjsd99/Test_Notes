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24000001F643D3A160.png" manifest:media-type="image/png"/>
  <manifest:file-entry manifest:full-path="Pictures/1000000000000550000003C07CAFE178.png" manifest:media-type="image/png"/>
  <manifest:file-entry manifest:full-path="Pictures/1000000000000550000003D4E548CBA8.png" manifest:media-type="image/png"/>
  <manifest:file-entry manifest:full-path="Pictures/1000000000000550000003D4BE568724.png" manifest:media-type="image/png"/>
  <manifest:file-entry manifest:full-path="Pictures/1000000000000550000002F8B3BF8B36.png" manifest:media-type="image/png"/>
  <manifest:file-entry manifest:full-path="Pictures/1000000000000550000003FCD632297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格1" style:family="table">
      <style:table-properties style:width="16.228cm" fo:margin-left="0cm" fo:margin-top="0cm" fo:margin-bottom="0cm" table:align="left" style:writing-mode="page"/>
    </style:style>
    <style:style style:name="表格1.A" style:family="table-column">
      <style:table-column-properties style:column-width="16.228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="0.706cm" fo:border="none">
        <style:background-image/>
      </style:table-cell-properties>
    </style:style>
    <style:style style:name="表格2" style:family="table">
      <style:table-properties style:width="16.228cm" fo:margin-left="0.009cm" fo:margin-top="0cm" fo:margin-bottom="0cm" table:align="left" style:writing-mode="page"/>
    </style:style>
    <style:style style:name="表格2.A" style:family="table-column">
      <style:table-column-properties style:column-width="16.228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" style:family="table">
      <style:table-properties style:width="16.228cm" fo:margin-left="0.009cm" fo:margin-top="0cm" fo:margin-bottom="0cm" table:align="left" style:writing-mode="page"/>
    </style:style>
    <style:style style:name="表格3.A" style:family="table-column">
      <style:table-column-properties style:column-width="16.228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4" style:family="table">
      <style:table-properties style:width="16.228cm" fo:margin-left="0.009cm" fo:margin-top="0cm" fo:margin-bottom="0cm" table:align="left" style:writing-mode="page"/>
    </style:style>
    <style:style style:name="表格4.A" style:family="table-column">
      <style:table-column-properties style:column-width="16.2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6e4f0" fo:padding-left="0.353cm" fo:padding-right="0.353cm" fo:padding-top="0.212cm" fo:padding-bottom="0.212cm" fo:border="0.5pt solid #1f3864">
        <style:background-image/>
      </style:table-cell-properties>
    </style:style>
    <style:style style:name="表格5" style:family="table">
      <style:table-properties style:width="16.228cm" fo:margin-left="0.009cm" fo:margin-top="0cm" fo:margin-bottom="0cm" table:align="left" style:writing-mode="page"/>
    </style:style>
    <style:style style:name="表格5.A" style:family="table-column">
      <style:table-column-properties style:column-width="8.043cm"/>
    </style:style>
    <style:style style:name="表格5.B" style:family="table-column">
      <style:table-column-properties style:column-width="8.184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5.B1" style:family="table-cell">
      <style:table-cell-properties fo:background-color="#d5f5e3" fo:padding-left="0.282cm" fo:padding-right="0.176cm" fo:padding-top="0.176cm" fo:padding-bottom="0.176cm" fo:border="0.5pt solid #2e75b6">
        <style:background-image/>
      </style:table-cell-properties>
    </style:style>
    <style:style style:name="表格6" style:family="table">
      <style:table-properties style:width="16.228cm" fo:margin-left="0.009cm" fo:margin-top="0cm" fo:margin-bottom="0cm" table:align="left" style:writing-mode="page"/>
    </style:style>
    <style:style style:name="表格6.A" style:family="table-column">
      <style:table-column-properties style:column-width="8.043cm"/>
    </style:style>
    <style:style style:name="表格6.B" style:family="table-column">
      <style:table-column-properties style:column-width="8.184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6.B1" style:family="table-cell">
      <style:table-cell-properties fo:background-color="#d5f5e3" fo:padding-left="0.282cm" fo:padding-right="0.176cm" fo:padding-top="0.176cm" fo:padding-bottom="0.176cm" fo:border="0.5pt solid #2e75b6">
        <style:background-image/>
      </style:table-cell-properties>
    </style:style>
    <style:style style:name="表格7" style:family="table">
      <style:table-properties style:width="16.228cm" fo:margin-left="0.009cm" fo:margin-top="0cm" fo:margin-bottom="0cm" table:align="left" style:writing-mode="page"/>
    </style:style>
    <style:style style:name="表格7.A" style:family="table-column">
      <style:table-column-properties style:column-width="16.22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8" style:family="table">
      <style:table-properties style:width="16.228cm" fo:margin-left="0.009cm" fo:margin-top="0cm" fo:margin-bottom="0cm" table:align="left" style:writing-mode="page"/>
    </style:style>
    <style:style style:name="表格8.A" style:family="table-column">
      <style:table-column-properties style:column-width="16.228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9" style:family="table">
      <style:table-properties style:width="16.228cm" fo:margin-left="0.009cm" fo:margin-top="0cm" fo:margin-bottom="0cm" table:align="left" style:writing-mode="page"/>
    </style:style>
    <style:style style:name="表格9.A" style:family="table-column">
      <style:table-column-properties style:column-width="8.043cm"/>
    </style:style>
    <style:style style:name="表格9.B" style:family="table-column">
      <style:table-column-properties style:column-width="8.184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10" style:family="table">
      <style:table-properties style:width="16.228cm" fo:margin-left="0.009cm" fo:margin-top="0cm" fo:margin-bottom="0cm" table:align="left" style:writing-mode="page"/>
    </style:style>
    <style:style style:name="表格10.A" style:family="table-column">
      <style:table-column-properties style:column-width="16.228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11" style:family="table">
      <style:table-properties style:width="16.228cm" fo:margin-left="0.009cm" fo:margin-top="0cm" fo:margin-bottom="0cm" table:align="left" style:writing-mode="page"/>
    </style:style>
    <style:style style:name="表格11.A" style:family="table-column">
      <style:table-column-properties style:column-width="16.228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12" style:family="table">
      <style:table-properties style:width="16.228cm" fo:margin-left="0.009cm" fo:margin-top="0cm" fo:margin-bottom="0cm" table:align="left" style:writing-mode="page"/>
    </style:style>
    <style:style style:name="表格12.A" style:family="table-column">
      <style:table-column-properties style:column-width="16.228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353cm" fo:padding-right="0.353cm" fo:padding-top="0.212cm" fo:padding-bottom="0.212cm" fo:border="0.5pt solid #1f3864">
        <style:background-image/>
      </style:table-cell-properties>
    </style:style>
    <style:style style:name="表格13" style:family="table">
      <style:table-properties style:width="16.228cm" fo:margin-left="0.009cm" fo:margin-top="0cm" fo:margin-bottom="0cm" table:align="left" style:writing-mode="page"/>
    </style:style>
    <style:style style:name="表格13.A" style:family="table-column">
      <style:table-column-properties style:column-width="16.228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14" style:family="table">
      <style:table-properties style:width="16.228cm" fo:margin-left="0.009cm" fo:margin-top="0cm" fo:margin-bottom="0cm" table:align="left" style:writing-mode="page"/>
    </style:style>
    <style:style style:name="表格14.A" style:family="table-column">
      <style:table-column-properties style:column-width="3.246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176cm" fo:padding-right="0.176cm" fo:padding-top="0.141cm" fo:padding-bottom="0.141cm" fo:border="0.5pt solid #1f3864">
        <style:background-image/>
      </style:table-cell-properties>
    </style:style>
    <style:style style:name="表格14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14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15" style:family="table">
      <style:table-properties style:width="16.228cm" fo:margin-left="0.009cm" fo:margin-top="0cm" fo:margin-bottom="0cm" table:align="left" style:writing-mode="page"/>
    </style:style>
    <style:style style:name="表格15.A" style:family="table-column">
      <style:table-column-properties style:column-width="16.228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6" style:family="table">
      <style:table-properties style:width="16.228cm" fo:margin-left="0.009cm" fo:margin-top="0cm" fo:margin-bottom="0cm" table:align="left" style:writing-mode="page"/>
    </style:style>
    <style:style style:name="表格16.A" style:family="table-column">
      <style:table-column-properties style:column-width="16.228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17" style:family="table">
      <style:table-properties style:width="16.228cm" fo:margin-left="0.009cm" fo:margin-top="0cm" fo:margin-bottom="0cm" table:align="left" style:writing-mode="page"/>
    </style:style>
    <style:style style:name="表格17.A" style:family="table-column">
      <style:table-column-properties style:column-width="16.228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8" style:family="table">
      <style:table-properties style:width="16.228cm" fo:margin-left="0.009cm" fo:margin-top="0cm" fo:margin-bottom="0cm" table:align="left" style:writing-mode="page"/>
    </style:style>
    <style:style style:name="表格18.A" style:family="table-column">
      <style:table-column-properties style:column-width="16.228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9" style:family="table">
      <style:table-properties style:width="16.228cm" fo:margin-left="0.009cm" fo:margin-top="0cm" fo:margin-bottom="0cm" table:align="left" style:writing-mode="page"/>
    </style:style>
    <style:style style:name="表格19.A" style:family="table-column">
      <style:table-column-properties style:column-width="16.228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0" style:family="table">
      <style:table-properties style:width="16.228cm" fo:margin-left="0.009cm" fo:margin-top="0cm" fo:margin-bottom="0cm" table:align="left" style:writing-mode="page"/>
    </style:style>
    <style:style style:name="表格20.A" style:family="table-column">
      <style:table-column-properties style:column-width="16.228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1" style:family="table">
      <style:table-properties style:width="16.228cm" fo:margin-left="0.009cm" fo:margin-top="0cm" fo:margin-bottom="0cm" table:align="left" style:writing-mode="page"/>
    </style:style>
    <style:style style:name="表格21.A" style:family="table-column">
      <style:table-column-properties style:column-width="16.228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22" style:family="table">
      <style:table-properties style:width="16.228cm" fo:margin-left="0.009cm" fo:margin-top="0cm" fo:margin-bottom="0cm" table:align="left" style:writing-mode="page"/>
    </style:style>
    <style:style style:name="表格22.A" style:family="table-column">
      <style:table-column-properties style:column-width="16.228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23" style:family="table">
      <style:table-properties style:width="16.228cm" fo:margin-left="0.009cm" fo:margin-top="0cm" fo:margin-bottom="0cm" table:align="left" style:writing-mode="page"/>
    </style:style>
    <style:style style:name="表格23.A" style:family="table-column">
      <style:table-column-properties style:column-width="16.228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24" style:family="table">
      <style:table-properties style:width="16.228cm" fo:margin-left="0.009cm" fo:margin-top="0cm" fo:margin-bottom="0cm" table:align="left" style:writing-mode="page"/>
    </style:style>
    <style:style style:name="表格24.A" style:family="table-column">
      <style:table-column-properties style:column-width="16.228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5" style:family="table">
      <style:table-properties style:width="16.228cm" fo:margin-left="0.009cm" fo:margin-top="0cm" fo:margin-bottom="0cm" table:align="left" style:writing-mode="page"/>
    </style:style>
    <style:style style:name="表格25.A" style:family="table-column">
      <style:table-column-properties style:column-width="2.819cm"/>
    </style:style>
    <style:style style:name="表格25.B" style:family="table-column">
      <style:table-column-properties style:column-width="3.881cm"/>
    </style:style>
    <style:style style:name="表格25.C" style:family="table-column">
      <style:table-column-properties style:column-width="3.528cm"/>
    </style:style>
    <style:style style:name="表格25.D" style:family="table-column">
      <style:table-column-properties style:column-width="6.00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25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25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26" style:family="table">
      <style:table-properties style:width="16.228cm" fo:margin-left="0.009cm" fo:margin-top="0cm" fo:margin-bottom="0cm" table:align="left" style:writing-mode="page"/>
    </style:style>
    <style:style style:name="表格26.A" style:family="table-column">
      <style:table-column-properties style:column-width="16.228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7" style:family="table">
      <style:table-properties style:width="16.228cm" fo:margin-left="0.009cm" fo:margin-top="0cm" fo:margin-bottom="0cm" table:align="left" style:writing-mode="page"/>
    </style:style>
    <style:style style:name="表格27.A" style:family="table-column">
      <style:table-column-properties style:column-width="16.228cm"/>
    </style:style>
    <style:style style:name="表格27.1" style:family="table-row">
      <style:table-row-properties style:min-row-height="8.054cm" fo:keep-together="auto"/>
    </style:style>
    <style:style style:name="表格27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28" style:family="table">
      <style:table-properties style:width="16.228cm" fo:margin-left="0.009cm" fo:margin-top="0cm" fo:margin-bottom="0cm" table:align="left" style:writing-mode="page"/>
    </style:style>
    <style:style style:name="表格28.A" style:family="table-column">
      <style:table-column-properties style:column-width="2.819cm"/>
    </style:style>
    <style:style style:name="表格28.B" style:family="table-column">
      <style:table-column-properties style:column-width="3.881cm"/>
    </style:style>
    <style:style style:name="表格28.C" style:family="table-column">
      <style:table-column-properties style:column-width="3.528cm"/>
    </style:style>
    <style:style style:name="表格28.D" style:family="table-column">
      <style:table-column-properties style:column-width="6.00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28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28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28.A4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29" style:family="table">
      <style:table-properties style:width="16.228cm" fo:margin-left="0.009cm" fo:margin-top="0cm" fo:margin-bottom="0cm" table:align="left" style:writing-mode="page"/>
    </style:style>
    <style:style style:name="表格29.A" style:family="table-column">
      <style:table-column-properties style:column-width="16.228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0" style:family="table">
      <style:table-properties style:width="16.228cm" fo:margin-left="0.009cm" fo:margin-top="0cm" fo:margin-bottom="0cm" table:align="left" style:writing-mode="page"/>
    </style:style>
    <style:style style:name="表格30.A" style:family="table-column">
      <style:table-column-properties style:column-width="2.819cm"/>
    </style:style>
    <style:style style:name="表格30.B" style:family="table-column">
      <style:table-column-properties style:column-width="3.881cm"/>
    </style:style>
    <style:style style:name="表格30.C" style:family="table-column">
      <style:table-column-properties style:column-width="3.528cm"/>
    </style:style>
    <style:style style:name="表格30.D" style:family="table-column">
      <style:table-column-properties style:column-width="6.00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30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30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31" style:family="table">
      <style:table-properties style:width="16.228cm" fo:margin-left="0.009cm" fo:margin-top="0cm" fo:margin-bottom="0cm" table:align="left" style:writing-mode="page"/>
    </style:style>
    <style:style style:name="表格31.A" style:family="table-column">
      <style:table-column-properties style:column-width="16.2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2" style:family="table">
      <style:table-properties style:width="16.228cm" fo:margin-left="0.009cm" fo:margin-top="0cm" fo:margin-bottom="0cm" table:align="left" style:writing-mode="page"/>
    </style:style>
    <style:style style:name="表格32.A" style:family="table-column">
      <style:table-column-properties style:column-width="16.228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3" style:family="table">
      <style:table-properties style:width="16.228cm" fo:margin-left="0.009cm" fo:margin-top="0cm" fo:margin-bottom="0cm" table:align="left" style:writing-mode="page"/>
    </style:style>
    <style:style style:name="表格33.A" style:family="table-column">
      <style:table-column-properties style:column-width="16.228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3.A2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34" style:family="table">
      <style:table-properties style:width="16.228cm" fo:margin-left="0.009cm" fo:margin-top="0cm" fo:margin-bottom="0cm" table:align="left" style:writing-mode="page"/>
    </style:style>
    <style:style style:name="表格34.A" style:family="table-column">
      <style:table-column-properties style:column-width="16.228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35" style:family="table">
      <style:table-properties style:width="16.228cm" fo:margin-left="0.009cm" fo:margin-top="0cm" fo:margin-bottom="0cm" table:align="left" style:writing-mode="page"/>
    </style:style>
    <style:style style:name="表格35.A" style:family="table-column">
      <style:table-column-properties style:column-width="16.228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6" style:family="table">
      <style:table-properties style:width="16.228cm" fo:margin-left="0.009cm" fo:margin-top="0cm" fo:margin-bottom="0cm" table:align="left" style:writing-mode="page"/>
    </style:style>
    <style:style style:name="表格36.A" style:family="table-column">
      <style:table-column-properties style:column-width="16.228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37" style:family="table">
      <style:table-properties style:width="16.228cm" fo:margin-left="0.009cm" fo:margin-top="0cm" fo:margin-bottom="0cm" table:align="left" style:writing-mode="page"/>
    </style:style>
    <style:style style:name="表格37.A" style:family="table-column">
      <style:table-column-properties style:column-width="16.228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7.A3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37.A5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8" style:family="table">
      <style:table-properties style:width="16.228cm" fo:margin-left="0.009cm" fo:margin-top="0cm" fo:margin-bottom="0cm" table:align="left" style:writing-mode="page"/>
    </style:style>
    <style:style style:name="表格38.A" style:family="table-column">
      <style:table-column-properties style:column-width="16.228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9" style:family="table">
      <style:table-properties style:width="16.228cm" fo:margin-left="0.009cm" fo:margin-top="0cm" fo:margin-bottom="0cm" table:align="left" style:writing-mode="page"/>
    </style:style>
    <style:style style:name="表格39.A" style:family="table-column">
      <style:table-column-properties style:column-width="16.228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0" style:family="table">
      <style:table-properties style:width="16.228cm" fo:margin-left="0.009cm" fo:margin-top="0cm" fo:margin-bottom="0cm" table:align="left" style:writing-mode="page"/>
    </style:style>
    <style:style style:name="表格40.A" style:family="table-column">
      <style:table-column-properties style:column-width="16.228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1" style:family="table">
      <style:table-properties style:width="16.228cm" fo:margin-left="0.009cm" fo:margin-top="0cm" fo:margin-bottom="0cm" table:align="left" style:writing-mode="page"/>
    </style:style>
    <style:style style:name="表格41.A" style:family="table-column">
      <style:table-column-properties style:column-width="16.228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42" style:family="table">
      <style:table-properties style:width="16.228cm" fo:margin-left="0.009cm" fo:margin-top="0cm" fo:margin-bottom="0cm" table:align="left" style:writing-mode="page"/>
    </style:style>
    <style:style style:name="表格42.A" style:family="table-column">
      <style:table-column-properties style:column-width="16.228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43" style:family="table">
      <style:table-properties style:width="16.228cm" fo:margin-left="0.009cm" fo:margin-top="0cm" fo:margin-bottom="0cm" table:align="left" style:writing-mode="page"/>
    </style:style>
    <style:style style:name="表格43.A" style:family="table-column">
      <style:table-column-properties style:column-width="16.228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4" style:family="table">
      <style:table-properties style:width="16.228cm" fo:margin-left="0.009cm" fo:margin-top="0cm" fo:margin-bottom="0cm" table:align="left" style:writing-mode="page"/>
    </style:style>
    <style:style style:name="表格44.A" style:family="table-column">
      <style:table-column-properties style:column-width="16.228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45" style:family="table">
      <style:table-properties style:width="16.228cm" fo:margin-left="0.009cm" fo:margin-top="0cm" fo:margin-bottom="0cm" table:align="left" style:writing-mode="page"/>
    </style:style>
    <style:style style:name="表格45.A" style:family="table-column">
      <style:table-column-properties style:column-width="16.228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6" style:family="table">
      <style:table-properties style:width="16.228cm" fo:margin-left="0.009cm" fo:margin-top="0cm" fo:margin-bottom="0cm" table:align="left" style:writing-mode="page"/>
    </style:style>
    <style:style style:name="表格46.A" style:family="table-column">
      <style:table-column-properties style:column-width="16.22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47" style:family="table">
      <style:table-properties style:width="16.228cm" fo:margin-left="0.009cm" fo:margin-top="0cm" fo:margin-bottom="0cm" table:align="left" style:writing-mode="page"/>
    </style:style>
    <style:style style:name="表格47.A" style:family="table-column">
      <style:table-column-properties style:column-width="2.819cm"/>
    </style:style>
    <style:style style:name="表格47.B" style:family="table-column">
      <style:table-column-properties style:column-width="3.881cm"/>
    </style:style>
    <style:style style:name="表格47.C" style:family="table-column">
      <style:table-column-properties style:column-width="3.528cm"/>
    </style:style>
    <style:style style:name="表格47.D" style:family="table-column">
      <style:table-column-properties style:column-width="6.00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47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47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47.A5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48" style:family="table">
      <style:table-properties style:width="16.228cm" fo:margin-left="0.009cm" fo:margin-top="0cm" fo:margin-bottom="0cm" table:align="left" style:writing-mode="page"/>
    </style:style>
    <style:style style:name="表格48.A" style:family="table-column">
      <style:table-column-properties style:column-width="16.228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49" style:family="table">
      <style:table-properties style:width="16.228cm" fo:margin-left="0.009cm" fo:margin-top="0cm" fo:margin-bottom="0cm" table:align="left" style:writing-mode="page"/>
    </style:style>
    <style:style style:name="表格49.A" style:family="table-column">
      <style:table-column-properties style:column-width="16.228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50" style:family="table">
      <style:table-properties style:width="16.228cm" fo:margin-left="0.009cm" fo:margin-top="0cm" fo:margin-bottom="0cm" table:align="left" style:writing-mode="page"/>
    </style:style>
    <style:style style:name="表格50.A" style:family="table-column">
      <style:table-column-properties style:column-width="16.228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86" style:family="table">
      <style:table-properties style:width="15.24cm" fo:margin-left="-0.191cm" fo:margin-top="0cm" fo:margin-bottom="0cm" table:align="left" style:writing-mode="lr-tb"/>
    </style:style>
    <style:style style:name="表格86.A" style:family="table-column">
      <style:table-column-properties style:column-width="7.62cm"/>
    </style:style>
    <style:style style:name="表格86.1" style:family="table-row">
      <style:table-row-properties fo:keep-together="auto"/>
    </style:style>
    <style:style style:name="表格86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87" style:family="table">
      <style:table-properties style:width="15.24cm" fo:margin-left="-0.191cm" fo:margin-top="0cm" fo:margin-bottom="0cm" table:align="left" style:writing-mode="lr-tb"/>
    </style:style>
    <style:style style:name="表格87.A" style:family="table-column">
      <style:table-column-properties style:column-width="7.62cm"/>
    </style:style>
    <style:style style:name="表格87.1" style:family="table-row">
      <style:table-row-properties fo:keep-together="auto"/>
    </style:style>
    <style:style style:name="表格87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88" style:family="table">
      <style:table-properties style:width="15.24cm" fo:margin-left="-0.191cm" fo:margin-top="0cm" fo:margin-bottom="0cm" table:align="left" style:writing-mode="lr-tb"/>
    </style:style>
    <style:style style:name="表格88.A" style:family="table-column">
      <style:table-column-properties style:column-width="7.62cm"/>
    </style:style>
    <style:style style:name="表格88.1" style:family="table-row">
      <style:table-row-properties fo:keep-together="auto"/>
    </style:style>
    <style:style style:name="表格88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51" style:family="table">
      <style:table-properties style:width="16.228cm" fo:margin-left="0.009cm" fo:margin-top="0cm" fo:margin-bottom="0cm" table:align="left" style:writing-mode="page"/>
    </style:style>
    <style:style style:name="表格51.A" style:family="table-column">
      <style:table-column-properties style:column-width="16.228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52" style:family="table">
      <style:table-properties style:width="16.228cm" fo:margin-left="0.009cm" fo:margin-top="0cm" fo:margin-bottom="0cm" table:align="left" style:writing-mode="page"/>
    </style:style>
    <style:style style:name="表格52.A" style:family="table-column">
      <style:table-column-properties style:column-width="16.228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3" style:family="table">
      <style:table-properties style:width="16.228cm" fo:margin-left="0.009cm" fo:margin-top="0cm" fo:margin-bottom="0cm" table:align="left" style:writing-mode="page"/>
    </style:style>
    <style:style style:name="表格53.A" style:family="table-column">
      <style:table-column-properties style:column-width="16.228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4" style:family="table">
      <style:table-properties style:width="16.228cm" fo:margin-left="0.009cm" fo:margin-top="0cm" fo:margin-bottom="0cm" table:align="left" style:writing-mode="page"/>
    </style:style>
    <style:style style:name="表格54.A" style:family="table-column">
      <style:table-column-properties style:column-width="16.228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55" style:family="table">
      <style:table-properties style:width="16.228cm" fo:margin-left="0.009cm" fo:margin-top="0cm" fo:margin-bottom="0cm" table:align="left" style:writing-mode="page"/>
    </style:style>
    <style:style style:name="表格55.A" style:family="table-column">
      <style:table-column-properties style:column-width="16.228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56" style:family="table">
      <style:table-properties style:width="16.228cm" fo:margin-left="0.009cm" fo:margin-top="0cm" fo:margin-bottom="0cm" table:align="left" style:writing-mode="page"/>
    </style:style>
    <style:style style:name="表格56.A" style:family="table-column">
      <style:table-column-properties style:column-width="16.228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6.A2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56.A3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57" style:family="table">
      <style:table-properties style:width="16.228cm" fo:margin-left="0.009cm" fo:margin-top="0cm" fo:margin-bottom="0cm" table:align="left" style:writing-mode="page"/>
    </style:style>
    <style:style style:name="表格57.A" style:family="table-column">
      <style:table-column-properties style:column-width="16.228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58" style:family="table">
      <style:table-properties style:width="16.228cm" fo:margin-left="0.009cm" fo:margin-top="0cm" fo:margin-bottom="0cm" table:align="left" style:writing-mode="page"/>
    </style:style>
    <style:style style:name="表格58.A" style:family="table-column">
      <style:table-column-properties style:column-width="16.228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59" style:family="table">
      <style:table-properties style:width="16.228cm" fo:margin-left="0.009cm" fo:margin-top="0cm" fo:margin-bottom="0cm" table:align="left" style:writing-mode="page"/>
    </style:style>
    <style:style style:name="表格59.A" style:family="table-column">
      <style:table-column-properties style:column-width="16.228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60" style:family="table">
      <style:table-properties style:width="16.228cm" fo:margin-left="0.009cm" fo:margin-top="0cm" fo:margin-bottom="0cm" table:align="left" style:writing-mode="page"/>
    </style:style>
    <style:style style:name="表格60.A" style:family="table-column">
      <style:table-column-properties style:column-width="16.228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61" style:family="table">
      <style:table-properties style:width="16.228cm" fo:margin-left="0.009cm" fo:margin-top="0cm" fo:margin-bottom="0cm" table:align="left" style:writing-mode="page"/>
    </style:style>
    <style:style style:name="表格61.A" style:family="table-column">
      <style:table-column-properties style:column-width="16.228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62" style:family="table">
      <style:table-properties style:width="16.228cm" fo:margin-left="0.009cm" fo:margin-top="0cm" fo:margin-bottom="0cm" table:align="left" style:writing-mode="page"/>
    </style:style>
    <style:style style:name="表格62.A" style:family="table-column">
      <style:table-column-properties style:column-width="16.228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63" style:family="table">
      <style:table-properties style:width="16.228cm" fo:margin-left="0.009cm" fo:margin-top="0cm" fo:margin-bottom="0cm" table:align="left" style:writing-mode="page"/>
    </style:style>
    <style:style style:name="表格63.A" style:family="table-column">
      <style:table-column-properties style:column-width="2.819cm"/>
    </style:style>
    <style:style style:name="表格63.B" style:family="table-column">
      <style:table-column-properties style:column-width="3.881cm"/>
    </style:style>
    <style:style style:name="表格63.C" style:family="table-column">
      <style:table-column-properties style:column-width="3.528cm"/>
    </style:style>
    <style:style style:name="表格63.D" style:family="table-column">
      <style:table-column-properties style:column-width="6.00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63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63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63.A6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64" style:family="table">
      <style:table-properties style:width="16.228cm" fo:margin-left="0.009cm" fo:margin-top="0cm" fo:margin-bottom="0cm" table:align="left" style:writing-mode="page"/>
    </style:style>
    <style:style style:name="表格64.A" style:family="table-column">
      <style:table-column-properties style:column-width="16.228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65" style:family="table">
      <style:table-properties style:width="16.228cm" fo:margin-left="0.009cm" fo:margin-top="0cm" fo:margin-bottom="0cm" table:align="left" style:writing-mode="page"/>
    </style:style>
    <style:style style:name="表格65.A" style:family="table-column">
      <style:table-column-properties style:column-width="16.228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66" style:family="table">
      <style:table-properties style:width="16.228cm" fo:margin-left="0.009cm" fo:margin-top="0cm" fo:margin-bottom="0cm" table:align="left" style:writing-mode="page"/>
    </style:style>
    <style:style style:name="表格66.A" style:family="table-column">
      <style:table-column-properties style:column-width="16.228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67" style:family="table">
      <style:table-properties style:width="16.228cm" fo:margin-left="0.009cm" fo:margin-top="0cm" fo:margin-bottom="0cm" table:align="left" style:writing-mode="page"/>
    </style:style>
    <style:style style:name="表格67.A" style:family="table-column">
      <style:table-column-properties style:column-width="16.228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68" style:family="table">
      <style:table-properties style:width="16.228cm" fo:margin-left="0.009cm" fo:margin-top="0cm" fo:margin-bottom="0cm" table:align="left" style:writing-mode="page"/>
    </style:style>
    <style:style style:name="表格68.A" style:family="table-column">
      <style:table-column-properties style:column-width="16.228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69" style:family="table">
      <style:table-properties style:width="16.228cm" fo:margin-left="0.009cm" fo:margin-top="0cm" fo:margin-bottom="0cm" table:align="left" style:writing-mode="page"/>
    </style:style>
    <style:style style:name="表格69.A" style:family="table-column">
      <style:table-column-properties style:column-width="16.228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70" style:family="table">
      <style:table-properties style:width="16.228cm" fo:margin-left="0.009cm" fo:margin-top="0cm" fo:margin-bottom="0cm" table:align="left" style:writing-mode="page"/>
    </style:style>
    <style:style style:name="表格70.A" style:family="table-column">
      <style:table-column-properties style:column-width="16.228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71" style:family="table">
      <style:table-properties style:width="16.228cm" fo:margin-left="0.009cm" fo:margin-top="0cm" fo:margin-bottom="0cm" table:align="left" style:writing-mode="page"/>
    </style:style>
    <style:style style:name="表格71.A" style:family="table-column">
      <style:table-column-properties style:column-width="16.228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2" style:family="table">
      <style:table-properties style:width="16.228cm" fo:margin-left="0.009cm" fo:margin-top="0cm" fo:margin-bottom="0cm" table:align="left" style:writing-mode="page"/>
    </style:style>
    <style:style style:name="表格72.A" style:family="table-column">
      <style:table-column-properties style:column-width="16.228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3" style:family="table">
      <style:table-properties style:width="16.228cm" fo:margin-left="0.009cm" fo:margin-top="0cm" fo:margin-bottom="0cm" table:align="left" style:writing-mode="page"/>
    </style:style>
    <style:style style:name="表格73.A" style:family="table-column">
      <style:table-column-properties style:column-width="16.228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74" style:family="table">
      <style:table-properties style:width="16.228cm" fo:margin-left="0.009cm" fo:margin-top="0cm" fo:margin-bottom="0cm" table:align="left" style:writing-mode="page"/>
    </style:style>
    <style:style style:name="表格74.A" style:family="table-column">
      <style:table-column-properties style:column-width="16.22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5" style:family="table">
      <style:table-properties style:width="16.228cm" fo:margin-left="0.009cm" fo:margin-top="0cm" fo:margin-bottom="0cm" table:align="left" style:writing-mode="page"/>
    </style:style>
    <style:style style:name="表格75.A" style:family="table-column">
      <style:table-column-properties style:column-width="16.228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6" style:family="table">
      <style:table-properties style:width="16.228cm" fo:margin-left="0.009cm" fo:margin-top="0cm" fo:margin-bottom="0cm" table:align="left" style:writing-mode="page"/>
    </style:style>
    <style:style style:name="表格76.A" style:family="table-column">
      <style:table-column-properties style:column-width="16.228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7" style:family="table">
      <style:table-properties style:width="16.228cm" fo:margin-left="0.009cm" fo:margin-top="0cm" fo:margin-bottom="0cm" table:align="left" style:writing-mode="page"/>
    </style:style>
    <style:style style:name="表格77.A" style:family="table-column">
      <style:table-column-properties style:column-width="16.228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78" style:family="table">
      <style:table-properties style:width="16.228cm" fo:margin-left="0.009cm" fo:margin-top="0cm" fo:margin-bottom="0cm" table:align="left" style:writing-mode="page"/>
    </style:style>
    <style:style style:name="表格78.A" style:family="table-column">
      <style:table-column-properties style:column-width="16.22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9" style:family="table">
      <style:table-properties style:width="16.228cm" fo:margin-left="0.009cm" fo:margin-top="0cm" fo:margin-bottom="0cm" table:align="left" style:writing-mode="page"/>
    </style:style>
    <style:style style:name="表格79.A" style:family="table-column">
      <style:table-column-properties style:column-width="16.228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80" style:family="table">
      <style:table-properties style:width="16.228cm" fo:margin-left="0.009cm" fo:margin-top="0cm" fo:margin-bottom="0cm" table:align="left" style:writing-mode="page"/>
    </style:style>
    <style:style style:name="表格80.A" style:family="table-column">
      <style:table-column-properties style:column-width="16.228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81" style:family="table">
      <style:table-properties style:width="16.228cm" fo:margin-left="0.009cm" fo:margin-top="0cm" fo:margin-bottom="0cm" table:align="left" style:writing-mode="page"/>
    </style:style>
    <style:style style:name="表格81.A" style:family="table-column">
      <style:table-column-properties style:column-width="16.228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82" style:family="table">
      <style:table-properties style:width="16.228cm" fo:margin-left="0.009cm" fo:margin-top="0cm" fo:margin-bottom="0cm" table:align="left" style:writing-mode="page"/>
    </style:style>
    <style:style style:name="表格82.A" style:family="table-column">
      <style:table-column-properties style:column-width="16.228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8daef" fo:padding-left="0.353cm" fo:padding-right="0.353cm" fo:padding-top="0.212cm" fo:padding-bottom="0.212cm" fo:border="0.5pt solid #8e44ad">
        <style:background-image/>
      </style:table-cell-properties>
    </style:style>
    <style:style style:name="表格83" style:family="table">
      <style:table-properties style:width="16.228cm" fo:margin-left="0.009cm" fo:margin-top="0cm" fo:margin-bottom="0cm" table:align="left" style:writing-mode="page"/>
    </style:style>
    <style:style style:name="表格83.A" style:family="table-column">
      <style:table-column-properties style:column-width="16.228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84" style:family="table">
      <style:table-properties style:width="16.228cm" fo:margin-left="0.009cm" fo:margin-top="0cm" fo:margin-bottom="0cm" table:align="left" style:writing-mode="page"/>
    </style:style>
    <style:style style:name="表格84.A" style:family="table-column">
      <style:table-column-properties style:column-width="2.469cm"/>
    </style:style>
    <style:style style:name="表格84.B" style:family="table-column">
      <style:table-column-properties style:column-width="2.822cm"/>
    </style:style>
    <style:style style:name="表格84.C" style:family="table-column">
      <style:table-column-properties style:column-width="4.233cm"/>
    </style:style>
    <style:style style:name="表格84.D" style:family="table-column">
      <style:table-column-properties style:column-width="3.524cm"/>
    </style:style>
    <style:style style:name="表格84.E" style:family="table-column">
      <style:table-column-properties style:column-width="3.179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84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84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85" style:family="table">
      <style:table-properties style:width="16.228cm" fo:margin-left="0.009cm" fo:margin-top="0cm" fo:margin-bottom="0cm" table:align="left" style:writing-mode="page"/>
    </style:style>
    <style:style style:name="表格85.A" style:family="table-column">
      <style:table-column-properties style:column-width="16.228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141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" style:family="paragraph" style:parent-style-name="Standard">
      <style:paragraph-properties fo:margin-top="0.035cm" fo:margin-bottom="0.035cm" style:contextual-spacing="false" fo:text-align="left" style:justify-single-word="false"/>
    </style:style>
    <style:style style:name="P6" style:family="paragraph" style:parent-style-name="Standard">
      <style:paragraph-properties fo:margin-top="0cm" fo:margin-bottom="0.141cm" style:contextual-spacing="false" fo:text-align="left" style:justify-single-word="false"/>
    </style:style>
    <style:style style:name="P7" style:family="paragraph" style:parent-style-name="Standard">
      <style:paragraph-properties fo:margin-top="0.053cm" fo:margin-bottom="0.053cm" style:contextual-spacing="false" fo:text-align="left" style:justify-single-word="false"/>
    </style:style>
    <style:style style:name="P8" style:family="paragraph" style:parent-style-name="Heading_20_1">
      <loext:graphic-properties draw:fill="solid" draw:fill-color="#1f3864"/>
      <style:paragraph-properties fo:margin-left="0.353cm" fo:margin-top="0cm" fo:margin-bottom="0.353cm" style:contextual-spacing="false" fo:text-indent="0cm" style:auto-text-indent="false" fo:break-before="page" fo:background-color="#1f3864"/>
    </style:style>
    <style:style style:name="P9" style:family="paragraph" style:parent-style-name="Heading_20_2">
      <loext:graphic-properties draw:fill="solid" draw:fill-color="#2e75b6"/>
      <style:paragraph-properties fo:margin-left="0.282cm" fo:margin-top="0.423cm" fo:margin-bottom="0.282cm" style:contextual-spacing="false" fo:text-indent="0cm" style:auto-text-indent="false" fo:background-color="#2e75b6"/>
    </style:style>
    <style:style style:name="P10" style:family="paragraph" style:parent-style-name="Standard">
      <style:paragraph-properties fo:margin-top="0.053cm" fo:margin-bottom="0cm" style:contextual-spacing="false" fo:text-align="left" style:justify-single-word="false"/>
    </style:style>
    <style:style style:name="P11" style:family="paragraph" style:parent-style-name="Standard">
      <style:paragraph-properties fo:margin-top="0.106cm" fo:margin-bottom="0.106cm" style:contextual-spacing="false" fo:text-align="left" style:justify-single-word="false"/>
    </style:style>
    <style:style style:name="P12" style:family="paragraph" style:parent-style-name="Standard">
      <style:paragraph-properties fo:margin-top="0.035cm" fo:margin-bottom="0.035cm" style:contextual-spacing="false" fo:text-align="center" style:justify-single-word="false"/>
    </style:style>
    <style:style style:name="P13" style:family="paragraph" style:parent-style-name="Standard">
      <style:paragraph-properties fo:margin-top="0.141cm" fo:margin-bottom="0.071cm" style:contextual-spacing="false" fo:text-align="left" style:justify-single-word="false"/>
    </style:style>
    <style:style style:name="P14" style:family="paragraph" style:parent-style-name="Standard">
      <style:paragraph-properties fo:margin-top="0cm" fo:margin-bottom="0.106cm" style:contextual-spacing="false" fo:text-align="left" style:justify-single-word="false"/>
    </style:style>
    <style:style style:name="P15" style:family="paragraph" style:parent-style-name="Standard">
      <style:paragraph-properties fo:margin-top="0.035cm" fo:margin-bottom="0.106cm" style:contextual-spacing="false" fo:text-align="left" style:justify-single-word="false"/>
    </style:style>
    <style:style style:name="P16" style:family="paragraph" style:parent-style-name="Standard">
      <style:paragraph-properties fo:margin-top="0.018cm" fo:margin-bottom="0.018cm" style:contextual-spacing="false" fo:text-align="left" style:justify-single-word="false"/>
    </style:style>
    <style:style style:name="P17" style:family="paragraph" style:parent-style-name="Standard">
      <style:paragraph-properties fo:margin-top="0.018cm" fo:margin-bottom="0.071cm" style:contextual-spacing="false" fo:text-align="left" style:justify-single-word="false"/>
    </style:style>
    <style:style style:name="P18" style:family="paragraph" style:parent-style-name="Standard">
      <style:paragraph-properties fo:margin-top="0.035cm" fo:margin-bottom="0.053cm" style:contextual-spacing="false" fo:text-align="left" style:justify-single-word="false"/>
    </style:style>
    <style:style style:name="P19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P20" style:family="paragraph" style:parent-style-name="Standard">
      <style:paragraph-properties fo:margin-left="0.635cm" fo:margin-top="0.018cm" fo:margin-bottom="0.018cm" style:contextual-spacing="false" fo:text-align="left" style:justify-single-word="false"/>
    </style:style>
    <style:style style:name="P21" style:family="paragraph" style:parent-style-name="Standard">
      <style:paragraph-properties fo:margin-left="0.635cm" fo:margin-top="0.018cm" fo:margin-bottom="0.071cm" style:contextual-spacing="false" fo:text-align="left" style:justify-single-word="false"/>
    </style:style>
    <style:style style:name="P22" style:family="paragraph" style:parent-style-name="Standard">
      <style:paragraph-properties fo:margin-top="0cm" fo:margin-bottom="0cm" style:contextual-spacing="false" fo:text-align="left" style:justify-single-word="false"/>
    </style:style>
    <style:style style:name="P23" style:family="paragraph" style:parent-style-name="Standard">
      <style:paragraph-properties fo:margin-left="1.411cm" fo:margin-top="0.018cm" fo:margin-bottom="0.018cm" style:contextual-spacing="false" fo:text-align="left" style:justify-single-word="false"/>
    </style:style>
    <style:style style:name="P24" style:family="paragraph" style:parent-style-name="Standard">
      <style:paragraph-properties fo:margin-top="0cm" fo:margin-bottom="0.071cm" style:contextual-spacing="false" fo:text-align="left" style:justify-single-word="false"/>
    </style:style>
    <style:style style:name="P25" style:family="paragraph" style:parent-style-name="Standard">
      <style:paragraph-properties fo:margin-top="0.035cm" fo:margin-bottom="0.071cm" style:contextual-spacing="false" fo:text-align="left" style:justify-single-word="false"/>
    </style:style>
    <style:style style:name="P26" style:family="paragraph" style:parent-style-name="Standard">
      <style:paragraph-properties fo:margin-top="0.071cm" fo:margin-bottom="0cm" style:contextual-spacing="false" fo:text-align="center" style:justify-single-word="false"/>
    </style:style>
    <style:style style:name="P27" style:family="paragraph" style:parent-style-name="Standard">
      <style:paragraph-properties fo:margin-top="0.035cm" fo:margin-bottom="0cm" style:contextual-spacing="false" fo:text-align="left" style:justify-single-word="false"/>
    </style:style>
    <style:style style:name="P28" style:family="paragraph" style:parent-style-name="Standard">
      <style:paragraph-properties fo:margin-top="0.035cm" fo:margin-bottom="0.106cm" style:contextual-spacing="false" fo:text-align="center" style:justify-single-word="false"/>
    </style:style>
    <style:style style:name="P29" style:family="paragraph" style:parent-style-name="Standard">
      <style:paragraph-properties fo:margin-top="0cm" fo:margin-bottom="0.035cm" style:contextual-spacing="false" fo:text-align="center" style:justify-single-word="false"/>
    </style:style>
    <style:style style:name="P30" style:family="paragraph" style:parent-style-name="Standard">
      <style:paragraph-properties fo:margin-top="0.071cm" fo:margin-bottom="0.071cm" style:contextual-spacing="false" fo:text-align="left" style:justify-single-word="false"/>
    </style:style>
    <style:style style:name="P31" style:family="paragraph" style:parent-style-name="Standard">
      <style:paragraph-properties fo:margin-left="0.635cm" fo:margin-top="0.071cm" fo:margin-bottom="0.071cm" style:contextual-spacing="false" fo:text-align="left" style:justify-single-word="false"/>
    </style:style>
    <style:style style:name="P32" style:family="paragraph" style:parent-style-name="Standard">
      <style:paragraph-properties fo:margin-top="0.009cm" fo:margin-bottom="0.009cm" style:contextual-spacing="false" fo:text-align="left" style:justify-single-word="false"/>
    </style:style>
    <style:style style:name="P33" style:family="paragraph" style:parent-style-name="Standard">
      <style:paragraph-properties fo:margin-top="0.009cm" fo:margin-bottom="0.053cm" style:contextual-spacing="false" fo:text-align="left" style:justify-single-word="false"/>
    </style:style>
    <style:style style:name="P34" style:family="paragraph" style:parent-style-name="Standard">
      <style:paragraph-properties fo:margin-top="0.009cm" fo:margin-bottom="0.035cm" style:contextual-spacing="false" fo:text-align="left" style:justify-single-word="false"/>
    </style:style>
    <style:style style:name="P35" style:family="paragraph" style:parent-style-name="Standard">
      <style:paragraph-properties fo:margin-top="0.035cm" fo:margin-bottom="0.071cm" style:contextual-spacing="false" fo:text-align="center" style:justify-single-word="false"/>
    </style:style>
    <style:style style:name="P36" style:family="paragraph" style:parent-style-name="Standard">
      <style:paragraph-properties fo:margin-top="0.035cm" fo:margin-bottom="0cm" style:contextual-spacing="false" fo:text-align="center" style:justify-single-word="false"/>
    </style:style>
    <style:style style:name="P37" style:family="paragraph" style:parent-style-name="Standard">
      <style:paragraph-properties fo:margin-top="0.014cm" fo:margin-bottom="0.014cm" style:contextual-spacing="false" fo:text-align="left" style:justify-single-word="false"/>
    </style:style>
    <style:style style:name="P38" style:family="paragraph" style:parent-style-name="Standard">
      <style:paragraph-properties fo:margin-top="0.106cm" fo:margin-bottom="0cm" style:contextual-spacing="false" fo:text-align="left" style:justify-single-word="false"/>
    </style:style>
    <style:style style:name="P39" style:family="paragraph" style:parent-style-name="Standard">
      <style:paragraph-properties fo:margin-top="0.106cm" fo:margin-bottom="0.106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0" style:family="paragraph" style:parent-style-name="Standard">
      <style:paragraph-properties fo:margin-top="0.018cm" fo:margin-bottom="0cm" style:contextual-spacing="false" fo:text-align="left" style:justify-single-word="false"/>
    </style:style>
    <style:style style:name="P41" style:family="paragraph" style:parent-style-name="Standard">
      <style:paragraph-properties fo:margin-top="0.018cm" fo:margin-bottom="0.035cm" style:contextual-spacing="false" fo:text-align="left" style:justify-single-word="false"/>
    </style:style>
    <style:style style:name="P42" style:family="paragraph" style:parent-style-name="Standard">
      <style:paragraph-properties fo:margin-top="0.011cm" fo:margin-bottom="0.011cm" style:contextual-spacing="false"/>
    </style:style>
    <style:style style:name="P43" style:family="paragraph" style:parent-style-name="Standard">
      <style:paragraph-properties fo:margin-top="0.011cm" fo:margin-bottom="0.011cm" style:contextual-spacing="false"/>
      <style:text-properties fo:color="#e8eaf6" loext:opacity="100%" style:font-name="Courier New" fo:font-size="10pt" fo:font-style="normal" fo:font-weight="normal" fo:background-color="#1f3864" style:font-name-asian="Courier New1" style:font-size-asian="10pt" style:font-style-asian="normal" style:font-weight-asian="normal" style:font-name-complex="Courier New1" style:font-size-complex="10pt"/>
    </style:style>
    <style:style style:name="P44" style:family="paragraph" style:parent-style-name="Standard">
      <style:paragraph-properties fo:margin-top="0.011cm" fo:margin-bottom="0.011cm" style:contextual-spacing="false" fo:text-align="left" style:justify-single-word="false"/>
    </style:style>
    <style:style style:name="P45" style:family="paragraph" style:parent-style-name="Standard">
      <style:paragraph-properties fo:margin-top="0.011cm" fo:margin-bottom="0.011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6" style:family="paragraph" style:parent-style-name="Standard">
      <style:text-properties fo:font-size="11pt" fo:font-weight="bold" officeooo:paragraph-rsid="0017e7ab" style:font-size-asian="11pt" style:font-weight-asian="bold"/>
    </style:style>
    <style:style style:name="P47" style:family="paragraph" style:parent-style-name="Heading_20_2">
      <style:text-properties officeooo:paragraph-rsid="00191f33"/>
    </style:style>
    <style:style style:name="P48" style:family="paragraph" style:parent-style-name="Standard">
      <style:text-properties officeooo:paragraph-rsid="00191f33"/>
    </style:style>
    <style:style style:name="P49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Cambria" fo:font-size="11pt" fo:language="en" fo:country="US" officeooo:paragraph-rsid="00191f33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50" style:family="paragraph" style:parent-style-name="Standard">
      <style:text-properties fo:color="#000000" loext:opacity="100%" style:font-name="Arial" fo:font-size="10.5pt" fo:font-style="normal" fo:font-weight="normal" officeooo:paragraph-rsid="00191f33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P51" style:family="paragraph" style:parent-style-name="Standard">
      <style:paragraph-properties fo:margin-top="0.009cm" fo:margin-bottom="0.009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52" style:family="paragraph" style:parent-style-name="Standard">
      <style:paragraph-properties fo:margin-top="0.009cm" fo:margin-bottom="0cm" style:contextual-spacing="false" fo:text-align="left" style:justify-single-word="false"/>
    </style:style>
    <style:style style:name="P53" style:family="paragraph" style:parent-style-name="Standard">
      <style:paragraph-properties fo:margin-top="0.106cm" fo:margin-bottom="0.035cm" style:contextual-spacing="false" fo:text-align="center" style:justify-single-word="false"/>
    </style:style>
    <style:style style:name="T1" style:family="text">
      <style:text-properties fo:color="#aeb6c0" loext:opacity="100%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aeb6c0" loext:opacity="100%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aeb6c0" loext:opacity="100%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color="#ffffff" loext:opacity="100%" style:font-name="Arial" fo:font-size="26pt" fo:font-style="normal" fo:font-weight="bold" style:font-name-asian="Arial1" style:font-size-asian="26pt" style:font-style-asian="normal" style:font-weight-asian="bold" style:font-name-complex="Arial1" style:font-size-complex="26pt" style:font-style-complex="normal" style:font-weight-complex="bold"/>
    </style:style>
    <style:style style:name="T5" style:family="text">
      <style:text-properties fo:color="#ffffff" loext:opacity="100%" style:font-name="Arial" fo:font-size="26pt" fo:font-style="normal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T6" style:family="text">
      <style:text-properties fo:color="#ffffff" loext:opacity="100%" fo:font-size="26pt" fo:font-style="normal" fo:font-weight="bold" style:font-name-asian="Arial1" style:font-size-asian="26pt" style:font-style-asian="normal" style:font-weight-asian="bold" style:font-name-complex="Arial1" style:font-size-complex="26pt" style:font-style-complex="normal" style:font-weight-complex="bold"/>
    </style:style>
    <style:style style:name="T7" style:family="text">
      <style:text-properties fo:color="#aeb6c0" loext:opacity="100%" style:font-name="Arial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8" style:family="text">
      <style:text-properties fo:color="#aeb6c0" loext:opacity="100%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9" style:family="text">
      <style:text-properties fo:color="#f9e79f" loext:opacity="100%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f9e79f" loext:opacity="100%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1" style:family="text">
      <style:text-properties fo:color="#f9e79f" loext:opacity="100%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aeb6c0" loext:opacity="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fo:color="#aeb6c0" loext:opacity="100%" style:font-name="Arial" fo:font-size="10pt" fo:font-style="normal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fo:color="#aeb6c0" loext:opacity="100%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1f3864" loext:opacity="100%" style:font-name="Arial" fo:font-size="11.5pt" fo:font-style="normal" fo:font-weight="bold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6" style:family="text">
      <style:text-properties fo:color="#1f3864" loext:opacity="100%" fo:font-size="11.5pt" fo:font-style="normal" fo:font-weight="bold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7" style:family="text">
      <style:text-properties fo:color="#1f3864" loext:opacity="100%" style:font-name="Arial" fo:font-size="11.5pt" fo:font-style="normal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8" style:family="text">
      <style:text-properties fo:color="#000000" loext:opacity="100%" style:font-name="Arial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9" style:family="text">
      <style:text-properties fo:color="#000000" loext:opacity="100%" style:font-name="Arial" fo:font-size="10.5pt" fo:font-style="normal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0" style:family="text">
      <style:text-properties fo:color="#000000" loext:opacity="100%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1" style:family="text">
      <style:text-properties fo:color="#ffffff" loext:opacity="100%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2" style:family="text">
      <style:text-properties fo:color="#ffffff" loext:opacity="100%" style:font-name="Arial" fo:font-size="18pt" fo:font-weight="bold" style:font-size-asian="18pt" style:font-weight-asian="bold" style:font-name-complex="Arial1" style:font-size-complex="18pt" style:font-weight-complex="bold"/>
    </style:style>
    <style:style style:name="T23" style:family="text">
      <style:text-properties fo:color="#ffffff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4" style:family="text">
      <style:text-properties fo:color="#ffffff" loext:opacity="100%" style:font-name="Arial" fo:font-size="14pt" fo:font-weight="bold" style:font-size-asian="14pt" style:font-weight-asian="bold" style:font-name-complex="Arial1" style:font-size-complex="14pt" style:font-weight-complex="bold"/>
    </style:style>
    <style:style style:name="T25" style:family="text">
      <style:text-properties fo:color="#1f3864" loext:opacity="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6" style:family="text">
      <style:text-properties fo:color="#1f3864" loext:opacity="100%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1f3864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8" style:family="text">
      <style:text-properties fo:color="#000000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9" style:family="text">
      <style:text-properties fo:color="#000000" loext:opacity="100%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0" style:family="text">
      <style:text-properties fo:color="#000000" loext:opacity="100%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1" style:family="text">
      <style:text-properties fo:color="#000000" loext:opacity="100%" style:font-name="Arial" fo:font-size="11pt" fo:font-style="normal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2" style:family="text">
      <style:text-properties fo:color="#000000" loext:opacity="100%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3" style:family="text">
      <style:text-properties fo:color="#ff3d00" loext:opacity="100%" style:font-name="Arial" fo:font-size="11pt" fo:font-style="normal" fo:font-weight="bold" fo:background-color="#64ffda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34" style:family="text">
      <style:text-properties fo:color="#ffea00" loext:opacity="100%" style:font-name="Arial" fo:font-size="11pt" fo:font-style="normal" fo:font-weight="bold" fo:background-color="#3d5afe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35" style:family="text">
      <style:text-properties fo:color="#18ffff" loext:opacity="100%" style:font-name="Arial" fo:font-size="11.5pt" fo:font-style="normal" fo:font-weight="bold" fo:background-color="#d500f9" loext:char-shading-value="0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36" style:family="text">
      <style:text-properties fo:color="#18ffff" loext:opacity="100%" fo:font-size="11.5pt" fo:font-style="normal" fo:font-weight="bold" fo:background-color="#d500f9" loext:char-shading-value="0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37" style:family="text">
      <style:text-properties fo:color="#1de9b6" loext:opacity="100%" style:font-name="Arial" fo:font-size="11pt" fo:font-style="normal" fo:font-weight="bold" fo:background-color="#6d4c41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38" style:family="text">
      <style:text-properties fo:color="#1de9b6" loext:opacity="100%" fo:font-size="11pt" fo:font-style="normal" fo:font-weight="bold" fo:background-color="#6d4c41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9" style:family="text">
      <style:text-properties fo:color="#c6ff00" loext:opacity="100%" style:font-name="Arial" fo:font-size="11pt" fo:font-style="normal" fo:font-weight="bold" fo:background-color="#f50057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40" style:family="text">
      <style:text-properties fo:color="#c0392b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1" style:family="text">
      <style:text-properties fo:color="#c0392b" loext:opacity="100%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2" style:family="text">
      <style:text-properties fo:color="#c0392b" loext:opacity="100%" style:font-name="Arial" fo:font-size="10.5pt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3" style:family="text"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44" style:family="text">
      <style:text-properties fo:color="#c0392b" loext:opacity="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5" style:family="text">
      <style:text-properties fo:color="#c0392b" loext:opacity="100%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6" style:family="text">
      <style:text-properties fo:color="#c0392b" loext:opacity="100%" style:font-name="Arial" fo:font-size="10pt" fo:font-style="normal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7" style:family="text">
      <style:text-properties fo:color="#27ae60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8" style:family="text">
      <style:text-properties fo:color="#27ae60" loext:opacity="100%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9" style:family="text">
      <style:text-properties fo:color="#27ae60" loext:opacity="100%" style:font-name="Arial" fo:font-size="10.5pt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0" style:family="text">
      <style:text-properties fo:color="#27ae60" loext:opacity="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1" style:family="text">
      <style:text-properties fo:color="#27ae60" loext:opacity="100%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2" style:family="text">
      <style:text-properties fo:color="#27ae60" loext:opacity="100%" style:font-name="Arial" fo:font-size="10pt" fo:font-style="normal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3" style:family="text">
      <style:text-properties fo:color="#000000" loext:opacity="100%" style:font-name="Arial" fo:font-size="11pt" fo:font-style="normal" fo:font-weight="bold" fo:background-color="#ffd74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54" style:family="text">
      <style:text-properties fo:color="#e67e22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5" style:family="text">
      <style:text-properties fo:color="#e67e22" loext:opacity="100%" style:font-name="Arial" fo:font-size="10.5pt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6" style:family="text">
      <style:text-properties fo:color="#e67e22" loext:opacity="100%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7" style:family="text">
      <style:text-properties fo:color="#c6ff00" loext:opacity="100%" fo:font-size="11pt" fo:font-style="normal" fo:font-weight="bold" fo:background-color="#f50057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58" style:family="text">
      <style:text-properties fo:color="#ff3d00" loext:opacity="100%" fo:font-size="11pt" fo:font-style="normal" fo:font-weight="bold" fo:background-color="#64ffda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59" style:family="text">
      <style:text-properties fo:color="#ffff00" loext:opacity="100%" style:font-name="Arial" fo:font-size="11pt" fo:font-style="normal" fo:font-weight="bold" fo:background-color="#ff1744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60" style:family="text">
      <style:text-properties fo:color="#ffff00" loext:opacity="100%" fo:font-size="11pt" fo:font-style="normal" fo:font-weight="bold" fo:background-color="#ff1744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61" style:family="text">
      <style:text-properties fo:color="#7f8c8d" loext:opacity="100%" style:font-name="Arial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62" style:family="text">
      <style:text-properties fo:color="#7f8c8d" loext:opacity="100%" style:font-name="Arial" fo:font-size="10.5pt" fo:font-style="normal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63" style:family="text">
      <style:text-properties fo:color="#7f8c8d" loext:opacity="100%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64" style:family="text">
      <style:text-properties fo:color="#18ffff" loext:opacity="100%" style:font-name="Arial" fo:font-size="11pt" fo:font-style="normal" fo:font-weight="bold" fo:background-color="#d500f9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65" style:family="text">
      <style:text-properties fo:color="#18ffff" loext:opacity="100%" fo:font-size="11pt" fo:font-style="normal" fo:font-weight="bold" fo:background-color="#d500f9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66" style:family="text">
      <style:text-properties fo:color="#000000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67" style:family="text">
      <style:text-properties fo:color="#000000" loext:opacity="100%" style:font-name="Arial" fo:font-size="10.5pt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68" style:family="text">
      <style:text-properties fo:color="#000000" loext:opacity="100%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69" style:family="text">
      <style:text-properties fo:color="#27ae60" loext:opacity="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70" style:family="text">
      <style:text-properties fo:color="#27ae60" loext:opacity="100%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71" style:family="text">
      <style:text-properties fo:color="#27ae60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72" style:family="text">
      <style:text-properties fo:color="#1f3864" loext:opacity="100%" style:font-name="Arial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73" style:family="text">
      <style:text-properties fo:color="#1f3864" loext:opacity="100%" style:font-name="Arial" fo:font-size="12pt" fo:font-style="normal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74" style:family="text">
      <style:text-properties fo:color="#1f3864" loext:opacity="100%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75" style:family="text">
      <style:text-properties fo:color="#18ffff" loext:opacity="100%" style:font-name="Arial" fo:font-size="12pt" fo:font-style="normal" fo:font-weight="bold" fo:background-color="#d500f9" loext:char-shading-value="0" style:font-size-asian="12pt" style:font-style-asian="normal" style:font-weight-asian="bold" style:font-name-complex="Arial1" style:font-size-complex="12pt" style:font-style-complex="normal" style:font-weight-complex="bold"/>
    </style:style>
    <style:style style:name="T76" style:family="text">
      <style:text-properties fo:color="#18ffff" loext:opacity="100%" fo:font-size="12pt" fo:font-style="normal" fo:font-weight="bold" fo:background-color="#d500f9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77" style:family="text">
      <style:text-properties fo:color="#ffea00" loext:opacity="100%" fo:font-size="10.5pt" fo:font-style="normal" fo:font-weight="bold" fo:background-color="#1a237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78" style:family="text">
      <style:text-properties fo:color="#ffea00" loext:opacity="100%" style:font-name="Arial" fo:font-size="10.5pt" fo:font-style="normal" fo:font-weight="bold" fo:background-color="#1a237e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79" style:family="text">
      <style:text-properties fo:color="#000000" loext:opacity="100%" style:font-name="Arial" fo:font-size="11pt" fo:font-style="normal" fo:font-weight="bold" fo:background-color="#ffff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80" style:family="text">
      <style:text-properties fo:color="#000000" loext:opacity="100%" fo:font-size="11pt" fo:font-style="normal" fo:font-weight="bold" fo:background-color="#ffff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81" style:family="text">
      <style:text-properties fo:color="#1f3864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82" style:family="text">
      <style:text-properties fo:color="#1f3864" loext:opacity="100%" style:font-name="Arial" fo:font-size="10.5pt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83" style:family="text">
      <style:text-properties fo:color="#1f3864" loext:opacity="100%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84" style:family="text">
      <style:text-properties fo:color="#c0392b" loext:opacity="100%" style:font-name="Arial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85" style:family="text">
      <style:text-properties fo:color="#c0392b" loext:opacity="100%" style:font-name="Arial" fo:font-size="10.5pt" fo:font-style="normal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86" style:family="text">
      <style:text-properties fo:color="#c0392b" loext:opacity="100%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87" style:family="text">
      <style:text-properties fo:color="#1f3864" loext:opacity="100%" fo:font-size="12pt" fo:font-style="normal" fo:font-weight="bold" fo:background-color="#ffff00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88" style:family="text">
      <style:text-properties fo:color="#ffd740" loext:opacity="100%" style:font-name="Arial" fo:font-size="12pt" fo:font-style="normal" fo:font-weight="bold" fo:background-color="#000000" loext:char-shading-value="0" style:font-size-asian="12pt" style:font-style-asian="normal" style:font-weight-asian="bold" style:font-name-complex="Arial1" style:font-size-complex="12pt" style:font-style-complex="normal" style:font-weight-complex="bold"/>
    </style:style>
    <style:style style:name="T89" style:family="text">
      <style:text-properties fo:color="#c6ff00" loext:opacity="100%" style:font-name="Arial" fo:font-size="12pt" fo:font-style="normal" fo:font-weight="bold" fo:background-color="#000000" loext:char-shading-value="0" style:font-size-asian="12pt" style:font-style-asian="normal" style:font-weight-asian="bold" style:font-name-complex="Arial1" style:font-size-complex="12pt" style:font-style-complex="normal" style:font-weight-complex="bold"/>
    </style:style>
    <style:style style:name="T90" style:family="text">
      <style:text-properties fo:color="#c6ff00" loext:opacity="100%" fo:font-size="12pt" fo:font-style="normal" fo:font-weight="bold" fo:background-color="#000000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91" style:family="text">
      <style:text-properties fo:color="#2e75b6" loext:opacity="100%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2" style:family="text">
      <style:text-properties fo:color="#2e75b6" loext:opacity="100%" style:font-name="Arial" fo:font-size="11pt" fo:font-style="normal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3" style:family="text">
      <style:text-properties fo:color="#000000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4" style:family="text">
      <style:text-properties fo:color="#000000" loext:opacity="100%" style:font-name="Arial" fo:font-size="10.5pt" fo:font-style="normal" fo:font-weight="bold" fo:background-color="#c6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5" style:family="text">
      <style:text-properties fo:color="#000000" loext:opacity="100%" fo:font-size="10.5pt" fo:font-style="normal" fo:font-weight="bold" fo:background-color="#c6ff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6" style:family="text">
      <style:text-properties fo:color="#ff3d00" loext:opacity="100%" style:font-name="Arial" fo:font-size="10.5pt" fo:font-style="normal" fo:font-weight="bold" fo:background-color="#64ffda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7" style:family="text">
      <style:text-properties fo:color="#ff3d00" loext:opacity="100%" fo:font-size="10.5pt" fo:font-style="normal" fo:font-weight="bold" fo:background-color="#64ffda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8" style:family="text">
      <style:text-properties fo:color="#18ffff" loext:opacity="100%" style:font-name="Arial" fo:font-size="10.5pt" fo:font-style="normal" fo:font-weight="bold" fo:background-color="#d500f9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9" style:family="text"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100" style:family="text">
      <style:text-properties fo:color="#27ae60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01" style:family="text">
      <style:text-properties fo:color="#27ae60" loext:opacity="100%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02" style:family="text">
      <style:text-properties fo:color="#27ae60" loext:opacity="100%" style:font-name="Arial" fo:font-size="10pt" fo:font-style="normal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3" style:family="text">
      <style:text-properties fo:color="#ffd740" loext:opacity="100%" fo:font-size="11pt" fo:font-style="normal" fo:font-weight="bold" fo:background-color="#0000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04" style:family="text">
      <style:text-properties fo:color="#ffd740" loext:opacity="100%" style:font-name="Arial" fo:font-size="11pt" fo:font-style="normal" fo:font-weight="bold" fo:background-color="#0000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105" style:family="text">
      <style:text-properties fo:color="#1de9b6" loext:opacity="100%" fo:font-size="11pt" fo:font-style="normal" fo:font-weight="bold" fo:background-color="#0000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06" style:family="text">
      <style:text-properties fo:color="#1de9b6" loext:opacity="100%" style:font-name="Arial" fo:font-size="11pt" fo:font-style="normal" fo:font-weight="bold" fo:background-color="#0000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107" style:family="text">
      <style:text-properties fo:color="#e040fb" loext:opacity="100%" fo:font-size="11pt" fo:font-style="normal" fo:font-weight="bold" fo:background-color="#0000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08" style:family="text">
      <style:text-properties fo:color="#e040fb" loext:opacity="100%" style:font-name="Arial" fo:font-size="11pt" fo:font-style="normal" fo:font-weight="bold" fo:background-color="#0000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109" style:family="text">
      <style:text-properties fo:color="#ffffff" loext:opacity="100%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0" style:family="text">
      <style:text-properties fo:color="#ffffff" loext:opacity="100%" style:font-name="Arial" fo:font-size="9pt" fo:font-style="normal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111" style:family="text">
      <style:text-properties fo:color="#ffffff" loext:opacity="100%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2" style:family="text">
      <style:text-properties fo:color="#000000" loext:opacity="100%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13" style:family="text">
      <style:text-properties fo:color="#000000" loext:opacity="100%" style:font-name="Arial" fo:font-size="9pt" fo:font-style="normal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114" style:family="text">
      <style:text-properties fo:color="#000000" loext:opacity="100%" style:font-name="Arial" fo:font-size="9pt" fo:font-style="normal" fo:font-weight="bold" fo:background-color="#ffd740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5" style:family="text">
      <style:text-properties fo:color="#000000" loext:opacity="100%" style:font-name="Arial" fo:font-size="9pt" fo:font-style="normal" fo:font-weight="bold" fo:background-color="#ffd740" loext:char-shading-value="0" style:font-size-asian="9pt" style:font-style-asian="normal" style:font-weight-asian="bold" style:font-name-complex="Arial1" style:font-size-complex="9pt" style:font-style-complex="normal" style:font-weight-complex="bold"/>
    </style:style>
    <style:style style:name="T116" style:family="text">
      <style:text-properties fo:color="#000000" loext:opacity="100%" style:font-name="Arial" fo:font-size="9pt" fo:font-style="normal" fo:font-weight="bold" fo:background-color="#1de9b6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7" style:family="text">
      <style:text-properties fo:color="#000000" loext:opacity="100%" style:font-name="Arial" fo:font-size="9pt" fo:font-style="normal" fo:font-weight="bold" fo:background-color="#1de9b6" loext:char-shading-value="0" style:font-size-asian="9pt" style:font-style-asian="normal" style:font-weight-asian="bold" style:font-name-complex="Arial1" style:font-size-complex="9pt" style:font-style-complex="normal" style:font-weight-complex="bold"/>
    </style:style>
    <style:style style:name="T118" style:family="text">
      <style:text-properties fo:color="#000000" loext:opacity="100%" style:font-name="Arial" fo:font-size="9pt" fo:font-style="normal" fo:font-weight="bold" fo:background-color="#e040fb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9" style:family="text">
      <style:text-properties fo:color="#000000" loext:opacity="100%" style:font-name="Arial" fo:font-size="9pt" fo:font-style="normal" fo:font-weight="bold" fo:background-color="#e040fb" loext:char-shading-value="0" style:font-size-asian="9pt" style:font-style-asian="normal" style:font-weight-asian="bold" style:font-name-complex="Arial1" style:font-size-complex="9pt" style:font-style-complex="normal" style:font-weight-complex="bold"/>
    </style:style>
    <style:style style:name="T120" style:family="text">
      <style:text-properties fo:color="#000000" loext:opacity="100%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21" style:family="text">
      <style:text-properties fo:color="#ff3d00" loext:opacity="100%" style:font-name="Arial" fo:font-size="9pt" fo:font-style="normal" fo:font-weight="bold" fo:background-color="#64ffda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22" style:family="text">
      <style:text-properties fo:color="#ff3d00" loext:opacity="100%" style:font-name="Arial" fo:font-size="9pt" fo:font-style="normal" fo:font-weight="bold" fo:background-color="#64ffda" loext:char-shading-value="0" style:font-size-asian="9pt" style:font-style-asian="normal" style:font-weight-asian="bold" style:font-name-complex="Arial1" style:font-size-complex="9pt" style:font-style-complex="normal" style:font-weight-complex="bold"/>
    </style:style>
    <style:style style:name="T123" style:family="text">
      <style:text-properties fo:color="#ff3d00" loext:opacity="100%" fo:font-size="9pt" fo:font-style="normal" fo:font-weight="bold" fo:background-color="#64ffda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24" style:family="text">
      <style:text-properties fo:color="#ffff00" loext:opacity="100%" style:font-name="Arial" fo:font-size="9pt" fo:font-style="normal" fo:font-weight="bold" fo:background-color="#ff1744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25" style:family="text">
      <style:text-properties fo:color="#ffff00" loext:opacity="100%" style:font-name="Arial" fo:font-size="9pt" fo:font-style="normal" fo:font-weight="bold" fo:background-color="#ff1744" loext:char-shading-value="0" style:font-size-asian="9pt" style:font-style-asian="normal" style:font-weight-asian="bold" style:font-name-complex="Arial1" style:font-size-complex="9pt" style:font-style-complex="normal" style:font-weight-complex="bold"/>
    </style:style>
    <style:style style:name="T126" style:family="text">
      <style:text-properties fo:color="#ffff00" loext:opacity="100%" fo:font-size="9pt" fo:font-style="normal" fo:font-weight="bold" fo:background-color="#ff1744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27" style:family="text">
      <style:text-properties fo:color="#2e75b6" loext:opacity="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28" style:family="text">
      <style:text-properties fo:color="#2e75b6" loext:opacity="100%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29" style:family="text">
      <style:text-properties fo:color="#2e75b6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130" style:family="text">
      <style:text-properties fo:color="#18ffff" loext:opacity="100%" style:font-name="Arial" fo:font-size="10.5pt" fo:font-style="normal" fo:font-weight="bold" fo:background-color="#0000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1" style:family="text">
      <style:text-properties fo:color="#18ffff" loext:opacity="100%" fo:font-size="10.5pt" fo:font-style="normal" fo:font-weight="bold" fo:background-color="#0000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2" style:family="text">
      <style:text-properties fo:color="#ffff00" loext:opacity="100%" fo:font-size="11pt" fo:font-style="normal" fo:font-weight="bold" fo:background-color="#ff91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33" style:family="text">
      <style:text-properties fo:color="#ffff00" loext:opacity="100%" style:font-name="Arial" fo:font-size="11pt" fo:font-style="normal" fo:font-weight="bold" fo:background-color="#ff91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134" style:family="text">
      <style:text-properties fo:color="#00e676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135" style:family="text">
      <style:text-properties fo:color="#ffff00" loext:opacity="100%" style:font-name="Arial" fo:font-size="10.5pt" fo:font-style="normal" fo:font-weight="bold" fo:background-color="#ff91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6" style:family="text">
      <style:text-properties fo:color="#ffff00" loext:opacity="100%" fo:font-size="10.5pt" fo:font-style="normal" fo:font-weight="bold" fo:background-color="#ff91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7" style:family="text">
      <style:text-properties fo:color="#c6ff00" loext:opacity="100%" style:font-name="Arial" fo:font-size="10.5pt" fo:font-style="normal" fo:font-weight="bold" fo:background-color="#ff1744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8" style:family="text">
      <style:text-properties fo:color="#000000" loext:opacity="100%" fo:font-size="10.5pt" fo:font-style="normal" fo:font-weight="bold" fo:background-color="#ffff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9" style:family="text">
      <style:text-properties fo:color="#18ffff" loext:opacity="100%" fo:font-size="10.5pt" fo:font-style="normal" fo:font-weight="bold" fo:background-color="#d500f9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40" style:family="text">
      <style:text-properties fo:color="#00e676" loext:opacity="100%" fo:font-size="10.5pt" fo:font-style="normal" fo:font-weight="bold" fo:background-color="#0000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41" style:family="text">
      <style:text-properties fo:color="#00e676" loext:opacity="100%" style:font-name="Arial" fo:font-size="10.5pt" fo:font-style="normal" fo:font-weight="bold" fo:background-color="#0000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42" style:family="text">
      <style:text-properties fo:color="#e67e22" loext:opacity="100%" style:font-name="Arial" fo:font-size="10.5pt" fo:font-style="normal" fo:font-weight="bold" fo:background-color="#0000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43" style:family="text">
      <style:text-properties fo:color="#e67e22" loext:opacity="100%" fo:font-size="10.5pt" fo:font-style="normal" fo:font-weight="bold" fo:background-color="#0000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44" style:family="text">
      <style:text-properties fo:color="#000000" loext:opacity="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5" style:family="text">
      <style:text-properties fo:color="#000000" loext:opacity="100%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6" style:family="text">
      <style:text-properties fo:color="#000000" loext:opacity="100%" style:font-name="Arial" fo:font-size="10pt" fo:font-style="normal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7" style:family="text">
      <style:text-properties fo:color="#27ae60" loext:opacity="100%" style:font-name="Courier New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T148" style:family="text">
      <style:text-properties fo:color="#ffff00" loext:opacity="100%" style:font-name="Arial" fo:font-size="10pt" fo:font-style="normal" fo:font-weight="bold" fo:background-color="#ff9100" loext:char-shading-value="0" style:font-size-asian="10pt" style:font-style-asian="normal" style:font-weight-asian="bold" style:font-name-complex="Arial1" style:font-size-complex="10pt" style:font-style-complex="normal" style:font-weight-complex="bold"/>
    </style:style>
    <style:style style:name="T149" style:family="text">
      <style:text-properties fo:color="#ffff00" loext:opacity="100%" fo:font-size="10pt" fo:font-style="normal" fo:font-weight="bold" fo:background-color="#ff9100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50" style:family="text">
      <style:text-properties fo:color="#c0392b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51" style:family="text">
      <style:text-properties fo:color="#c6ff00" loext:opacity="100%" style:font-name="Arial" fo:font-size="10.5pt" fo:font-style="normal" fo:font-weight="bold" fo:background-color="#f50057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52" style:family="text">
      <style:text-properties fo:color="#c6ff00" loext:opacity="100%" fo:font-size="10.5pt" fo:font-style="normal" fo:font-weight="bold" fo:background-color="#f50057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53" style:family="text">
      <style:text-properties fo:color="#c6ff00" loext:opacity="100%" style:font-name="Arial" fo:font-size="10.5pt" fo:font-style="normal" fo:font-weight="bold" fo:background-color="#f50057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54" style:family="text">
      <style:text-properties fo:color="#27ae60" loext:opacity="100%" fo:font-size="10pt" fo:font-style="normal" fo:font-weight="bold" fo:background-color="#ffea00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55" style:family="text">
      <style:text-properties fo:color="#27ae60" loext:opacity="100%" style:font-name="Arial" fo:font-size="10pt" fo:font-style="normal" fo:font-weight="bold" fo:background-color="#ffea00" loext:char-shading-value="0" style:font-size-asian="10pt" style:font-style-asian="normal" style:font-weight-asian="bold" style:font-name-complex="Arial1" style:font-size-complex="10pt" style:font-style-complex="normal" style:font-weight-complex="bold"/>
    </style:style>
    <style:style style:name="T156" style:family="text">
      <style:text-properties fo:color="#ffe082" loext:opacity="100%" style:font-name="Courier New" fo:font-size="10pt" fo:font-style="normal" fo:font-weight="normal" fo:background-color="#1f3864" loext:char-shading-value="0" style:font-name-asian="Courier New1" style:font-size-asian="10pt" style:font-style-asian="normal" style:font-weight-asian="normal" style:font-name-complex="Courier New1" style:font-size-complex="10pt"/>
    </style:style>
    <style:style style:name="T157" style:family="text">
      <style:text-properties fo:color="#ffe082" loext:opacity="100%" style:font-name="Courier New" fo:font-size="10pt" fo:background-color="#1f3864" loext:char-shading-value="0" style:font-name-asian="Courier New1" style:font-size-asian="10pt" style:font-name-complex="Courier New1" style:font-size-complex="10pt"/>
    </style:style>
    <style:style style:name="T158" style:family="text">
      <style:text-properties fo:color="#e8eaf6" loext:opacity="100%" style:font-name="Courier New" fo:font-size="10pt" fo:font-style="normal" fo:font-weight="normal" fo:background-color="#1f3864" loext:char-shading-value="0" style:font-name-asian="Courier New1" style:font-size-asian="10pt" style:font-style-asian="normal" style:font-weight-asian="normal" style:font-name-complex="Courier New1" style:font-size-complex="10pt"/>
    </style:style>
    <style:style style:name="T159" style:family="text">
      <style:text-properties fo:color="#e8eaf6" loext:opacity="100%" style:font-name="Courier New" fo:font-size="10pt" fo:background-color="#1f3864" loext:char-shading-value="0" style:font-name-asian="Courier New1" style:font-size-asian="10pt" style:font-name-complex="Courier New1" style:font-size-complex="10pt"/>
    </style:style>
    <style:style style:name="T160" style:family="text">
      <style:text-properties fo:color="#ffffff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61" style:family="text">
      <style:text-properties fo:color="#ffffff" loext:opacity="100%" style:font-name="Arial" fo:font-size="10pt" fo:font-style="normal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62" style:family="text">
      <style:text-properties fo:color="#18ffff" loext:opacity="100%" style:font-name="Arial" fo:font-size="10pt" fo:font-style="normal" fo:font-weight="bold" fo:background-color="#d500f9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63" style:family="text">
      <style:text-properties fo:color="#18ffff" loext:opacity="100%" fo:font-size="10pt" fo:font-style="normal" fo:font-weight="bold" fo:background-color="#d500f9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64" style:family="text">
      <style:text-properties fo:color="#ff3d00" loext:opacity="100%" style:font-name="Arial" fo:font-size="10pt" fo:font-style="normal" fo:font-weight="bold" fo:background-color="#64ffda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65" style:family="text">
      <style:text-properties fo:color="#ff3d00" loext:opacity="100%" fo:font-size="10pt" fo:font-style="normal" fo:font-weight="bold" fo:background-color="#64ffda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66" style:family="text">
      <style:text-properties fo:color="#2979ff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67" style:family="text">
      <style:text-properties fo:color="#76ff03" loext:opacity="100%" style:font-name="Arial" fo:font-size="10.5pt" fo:font-style="normal" fo:font-weight="bold" fo:background-color="#d500f9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68" style:family="text">
      <style:text-properties fo:color="#76ff03" loext:opacity="100%" fo:font-size="10.5pt" fo:font-style="normal" fo:font-weight="bold" fo:background-color="#d500f9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69" style:family="text">
      <style:text-properties fo:color="#ffff00" loext:opacity="100%" style:font-name="Arial" fo:font-size="10.5pt" fo:font-style="normal" fo:font-weight="bold" fo:background-color="#ff1744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0" style:family="text">
      <style:text-properties fo:color="#76ff03" loext:opacity="100%" style:font-name="Arial" fo:font-size="10.5pt" fo:font-style="normal" fo:font-weight="bold" fo:background-color="#1a237e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1" style:family="text">
      <style:text-properties fo:color="#76ff03" loext:opacity="100%" fo:font-size="10.5pt" fo:font-style="normal" fo:font-weight="bold" fo:background-color="#1a237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2" style:family="text">
      <style:text-properties fo:color="#27ae60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3" style:family="text">
      <style:text-properties fo:color="#27ae60" loext:opacity="100%" fo:font-size="10.5pt" fo:font-style="normal" fo:font-weight="bold" fo:background-color="#ffff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4" style:family="text">
      <style:text-properties fo:color="#27ae60" loext:opacity="100%" fo:font-size="10.5pt" fo:font-style="normal" fo:font-weight="bold" fo:background-color="#ffc4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5" style:family="text">
      <style:text-properties fo:color="#e67e22" loext:opacity="100%" fo:font-size="10.5pt" fo:font-style="normal" fo:font-weight="bold" fo:background-color="#ffff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6" style:family="text">
      <style:text-properties fo:color="#e67e22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7" style:family="text">
      <style:text-properties fo:color="#ff1744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8" style:family="text">
      <style:text-properties fo:color="#ff1744" loext:opacity="100%" fo:font-size="10.5pt" fo:font-style="normal" fo:font-weight="bold" fo:background-color="#ffff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9" style:family="text">
      <style:text-properties fo:color="#00e676" loext:opacity="100%" style:font-name="Arial" fo:font-size="10.5pt" fo:font-style="normal" fo:font-weight="bold" fo:background-color="#5d4037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0" style:family="text">
      <style:text-properties fo:color="#2979ff" loext:opacity="100%" style:font-name="Arial" fo:font-size="10.5pt" fo:font-style="normal" fo:font-weight="bold" fo:background-color="#bcaaa4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1" style:family="text">
      <style:text-properties fo:color="#2979ff" loext:opacity="100%" fo:font-size="10.5pt" fo:font-style="normal" fo:font-weight="bold" fo:background-color="#bcaaa4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2" style:family="text">
      <style:text-properties fo:color="#f50057" loext:opacity="100%" style:font-name="Arial" fo:font-size="10.5pt" fo:font-style="normal" fo:font-weight="bold" fo:background-color="#bcaaa4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3" style:family="text">
      <style:text-properties fo:color="#1f3864" loext:opacity="100%" fo:font-size="11.5pt" fo:font-style="normal" fo:font-weight="bold" fo:background-color="#ffff00" loext:char-shading-value="0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84" style:family="text">
      <style:text-properties fo:color="#ff3d00" loext:opacity="100%" style:font-name="Arial" fo:font-size="11.5pt" fo:font-style="normal" fo:font-weight="bold" fo:background-color="#64ffda" loext:char-shading-value="0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85" style:family="text">
      <style:text-properties fo:color="#ff3d00" loext:opacity="100%" fo:font-size="11.5pt" fo:font-style="normal" fo:font-weight="bold" fo:background-color="#64ffda" loext:char-shading-value="0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86" style:family="text">
      <style:text-properties fo:color="#ffd740" loext:opacity="100%" style:font-name="Arial" fo:font-size="10.5pt" fo:font-style="normal" fo:font-weight="bold" fo:background-color="#0000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7" style:family="text">
      <style:text-properties fo:color="#ffd740" loext:opacity="100%" style:font-name="Arial" fo:font-size="10.5pt" fo:font-style="normal" fo:font-weight="bold" fo:background-color="#0000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8" style:family="text">
      <style:text-properties fo:color="#ffd740" loext:opacity="100%" fo:font-size="10.5pt" fo:font-style="normal" fo:font-weight="bold" fo:background-color="#0000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9" style:family="text">
      <style:text-properties fo:color="#76ff03" loext:opacity="100%" style:font-name="Arial" fo:font-size="10.5pt" fo:font-style="normal" fo:font-weight="bold" fo:background-color="#ff1744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0" style:family="text">
      <style:text-properties fo:color="#76ff03" loext:opacity="100%" fo:font-size="10.5pt" fo:font-style="normal" fo:font-weight="bold" fo:background-color="#ff1744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1" style:family="text">
      <style:text-properties fo:color="#00e676" loext:opacity="100%" fo:font-size="10.5pt" fo:font-style="normal" fo:font-weight="bold" fo:background-color="#5d4037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2" style:family="text">
      <style:text-properties fo:color="#f50057" loext:opacity="100%" style:font-name="Arial" fo:font-size="10.5pt" fo:font-style="normal" fo:font-weight="bold" fo:background-color="#f8bbd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3" style:family="text">
      <style:text-properties fo:color="#f50057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4" style:family="text">
      <style:text-properties fo:color="#f50057" loext:opacity="100%" fo:font-size="10.5pt" fo:font-style="normal" fo:font-weight="bold" fo:background-color="#f8bbd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5" style:family="text">
      <style:text-properties fo:color="#ffd740" loext:opacity="100%" style:font-name="Arial" fo:font-size="10.5pt" fo:font-style="normal" fo:font-weight="bold" fo:background-color="#3d5afe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6" style:family="text">
      <style:text-properties fo:color="#ffd740" loext:opacity="100%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7" style:family="text">
      <style:text-properties fo:color="#ffff00" loext:opacity="100%" style:font-name="Arial" fo:font-size="10.5pt" fo:font-style="normal" fo:font-weight="bold" fo:background-color="#f50057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8" style:family="text">
      <style:text-properties fo:color="#000000" loext:opacity="100%" style:font-name="Arial" fo:font-size="10.5pt" fo:font-style="normal" fo:font-weight="bold" fo:background-color="#ffd74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9" style:family="text">
      <style:text-properties fo:color="#000000" loext:opacity="100%" fo:font-size="10.5pt" fo:font-style="normal" fo:font-weight="bold" fo:background-color="#ffd74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0" style:family="text">
      <style:text-properties fo:color="#ffff00" loext:opacity="100%" fo:font-size="10.5pt" fo:font-style="normal" fo:font-weight="bold" fo:background-color="#ff1744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1" style:family="text">
      <style:text-properties fo:color="#76ff03" loext:opacity="100%" style:font-name="Arial" fo:font-size="10.5pt" fo:font-style="normal" fo:font-weight="bold" fo:background-color="#651fff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2" style:family="text">
      <style:text-properties fo:color="#76ff03" loext:opacity="100%" fo:font-size="10.5pt" fo:font-style="normal" fo:font-weight="bold" fo:background-color="#651fff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3" style:family="text">
      <style:text-properties fo:color="#1f3864" loext:opacity="100%" fo:font-size="12pt" fo:font-style="normal" fo:font-weight="bold" fo:background-color="#ffd740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04" style:family="text">
      <style:text-properties fo:color="#1f3864" loext:opacity="100%" style:font-name="Arial" fo:font-size="12pt" fo:font-style="normal" fo:font-weight="bold" fo:background-color="#ffd740" loext:char-shading-value="0" style:font-size-asian="12pt" style:font-style-asian="normal" style:font-weight-asian="bold" style:font-name-complex="Arial1" style:font-size-complex="12pt" style:font-style-complex="normal" style:font-weight-complex="bold"/>
    </style:style>
    <style:style style:name="T205" style:family="text">
      <style:text-properties fo:color="#b2ff59" loext:opacity="100%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6" style:family="text">
      <style:text-properties fo:color="#00e676" loext:opacity="100%" style:font-name="Arial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7" style:family="text">
      <style:text-properties fo:color="#00e676" loext:opacity="100%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8" style:family="text">
      <style:text-properties fo:color="#00e676" loext:opacity="100%" style:font-name="Arial" fo:font-size="10.5pt" fo:font-style="normal" fo:font-weight="bold" fo:background-color="#3d5afe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9" style:family="text">
      <style:text-properties fo:color="#ffff00" loext:opacity="100%" style:font-name="Arial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0" style:family="text">
      <style:text-properties fo:color="#ffff00" loext:opacity="100%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1" style:family="text">
      <style:text-properties fo:color="#ffff00" loext:opacity="100%" style:font-name="Arial" fo:font-size="10.5pt" fo:font-style="normal" fo:font-weight="bold" fo:background-color="#3d5afe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2" style:family="text">
      <style:text-properties fo:color="#27ae60" loext:opacity="100%" style:font-name="Arial" fo:font-size="10pt" fo:font-style="normal" fo:font-weight="bold" fo:background-color="#ffff00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213" style:family="text">
      <style:text-properties fo:color="#27ae60" loext:opacity="100%" fo:font-size="10pt" fo:font-style="normal" fo:font-weight="bold" fo:background-color="#ffff00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214" style:family="text">
      <style:text-properties fo:color="#c6ff00" loext:opacity="100%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5" style:family="text">
      <style:text-properties fo:color="#ffea00" loext:opacity="100%" fo:font-size="11pt" fo:font-style="normal" fo:font-weight="bold" fo:background-color="#1a237e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16" style:family="text">
      <style:text-properties fo:color="#ffea00" loext:opacity="100%" style:font-name="Arial" fo:font-size="11pt" fo:font-style="normal" fo:font-weight="bold" fo:background-color="#1a237e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217" style:family="text">
      <style:text-properties fo:color="#76ff03" loext:opacity="100%" style:font-name="Arial" fo:font-size="10.5pt" fo:font-style="normal" fo:font-weight="bold" fo:background-color="#1b5e2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8" style:family="text">
      <style:text-properties fo:color="#000000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9" style:family="text">
      <style:text-properties fo:color="#ff3d00" loext:opacity="100%" style:font-name="Arial" fo:font-size="10.5pt" fo:font-style="normal" fo:font-weight="bold" fo:background-color="#64ffda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20" style:family="text">
      <style:text-properties fo:color="#2e75b6" loext:opacity="100%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21" style:family="text">
      <style:text-properties fo:font-size="11pt" fo:font-weight="normal" style:font-size-asian="11pt" style:font-weight-asian="normal"/>
    </style:style>
    <style:style style:name="T222" style:family="text">
      <style:text-properties fo:font-size="11pt" fo:font-weight="bold" style:font-size-asian="11pt" style:font-weight-asian="bold"/>
    </style:style>
    <style:style style:name="T223" style:family="text">
      <style:text-properties fo:color="#ffffff" loext:opacity="100%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224" style:family="text">
      <style:text-properties fo:color="#000000" loext:opacity="100%" style:font-name="Courier New" fo:font-size="9.5pt" fo:font-style="normal" fo:font-weight="normal" style:font-name-asian="Courier New1" style:font-size-asian="9.5pt" style:font-style-asian="normal" style:font-weight-asian="normal" style:font-name-complex="Courier New1" style:font-size-complex="9.5pt" style:font-style-complex="normal" style:font-weight-complex="normal"/>
    </style:style>
    <style:style style:name="T225" style:family="text">
      <style:text-properties fo:color="#ffffff" loext:opacity="100%" style:font-name="Arial" fo:font-size="9.5pt" fo:font-style="normal" fo:font-weight="bold" style:font-name-asian="Arial1" style:font-size-asian="9.5pt" style:font-style-asian="normal" style:font-weight-asian="bold" style:font-name-complex="Arial1" style:font-size-complex="9.5pt" style:font-style-complex="normal" style:font-weight-complex="bold"/>
    </style:style>
    <style:style style:name="T226" style:family="text">
      <style:text-properties fo:color="#ffffff" loext:opacity="100%" style:font-name="Arial" fo:font-size="9.5pt" fo:font-style="normal" fo:font-weight="bold" style:font-size-asian="9.5pt" style:font-style-asian="normal" style:font-weight-asian="bold" style:font-name-complex="Arial1" style:font-size-complex="9.5pt" style:font-style-complex="normal" style:font-weight-complex="bold"/>
    </style:style>
    <style:style style:name="T227" style:family="text">
      <style:text-properties fo:color="#000000" loext:opacity="100%" style:font-name="Arial" fo:font-size="9.5pt" fo:font-style="normal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228" style:family="text">
      <style:text-properties fo:color="#000000" loext:opacity="100%" fo:font-size="9.5pt" fo:font-style="normal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229" style:family="text">
      <style:text-properties fo:color="#000000" loext:opacity="100%" style:font-name="Arial" fo:font-size="9.5pt" fo:font-style="normal" fo:font-weight="normal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230" style:family="text">
      <style:text-properties fo:color="#7f8c8d" loext:opacity="100%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31" style:family="text">
      <style:text-properties fo:color="#7f8c8d" loext:opacity="100%" style:font-name="Arial" fo:font-size="9pt" fo:font-style="normal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232" style:family="text">
      <style:text-properties fo:color="#7f8c8d" loext:opacity="100%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33" style:family="text">
      <style:text-properties fo:color="#1f3864" loext:opacity="100%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34" style:family="text">
      <style:text-properties fo:color="#1f3864" loext:opacity="100%" style:font-name="Arial" fo:font-size="9pt" fo:font-style="normal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235" style:family="text">
      <style:text-properties fo:color="#1f3864" loext:opacity="100%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 loext:marker-style-name="T1"><text:span text:style-name="T2">第 </text:span><text:span text:style-name="T3">15 </text:span><text:span text:style-name="T2">章</text:span></text:p>
            <text:p text:style-name="P2" loext:marker-style-name="T4"><text:span text:style-name="T5">最小擴張樹 </text:span><text:span text:style-name="T6">MST</text:span></text:p>
            <text:p text:style-name="P3" loext:marker-style-name="T7"><text:span text:style-name="T8">Minimum Spanning Tree</text:span><text:span text:style-name="T7"/></text:p>
            <text:p text:style-name="P1" loext:marker-style-name="T9"><text:span text:style-name="T10">Prim <text:s/></text:span><text:span text:style-name="T11">／ <text:s/></text:span><text:span text:style-name="T10">Kruskal <text:s/></text:span><text:span text:style-name="T11">／ <text:s/></text:span><text:span text:style-name="T10">Sollin</text:span><text:span text:style-name="T11">（</text:span><text:span text:style-name="T10">Borůvka</text:span><text:span text:style-name="T11">）</text:span></text:p>
            <text:p text:style-name="P4" loext:marker-style-name="T12"><text:span text:style-name="T13">圖解 </text:span><text:span text:style-name="T14">× </text:span><text:span text:style-name="T13">逐步推導 </text:span><text:span text:style-name="T14">× </text:span><text:span text:style-name="T13">程式實作 </text:span><text:span text:style-name="T14">× </text:span><text:span text:style-name="T13">公職考試完整版</text:span></text:p>
          </table:table-cell>
        </table:table-row>
      </table:table>
      <text:p text:style-name="P5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6" loext:marker-style-name="T15"><text:span text:style-name="T16">📖 </text:span><text:span text:style-name="T17">本章學習地圖</text:span></text:p>
            <text:p text:style-name="P7" loext:marker-style-name="T18"><text:span text:style-name="T19">第一章：</text:span><text:span text:style-name="T20">MST </text:span><text:span text:style-name="T19">是什麼？基本概念 </text:span><text:span text:style-name="T20">+ </text:span><text:span text:style-name="T19">名詞解釋</text:span></text:p>
            <text:p text:style-name="P7" loext:marker-style-name="T18"><text:span text:style-name="T19">第二章：三種演算法快速比較表</text:span><text:span text:style-name="T18"/></text:p>
            <text:p text:style-name="P7" loext:marker-style-name="T18"><text:span text:style-name="T19">第三章：</text:span><text:span text:style-name="T20">Prim </text:span><text:span text:style-name="T19">演算法 ── 圖解 </text:span><text:span text:style-name="T20">+ </text:span><text:span text:style-name="T19">逐步推導 </text:span><text:span text:style-name="T20">+ C++ </text:span><text:span text:style-name="T19">程式碼</text:span></text:p>
            <text:p text:style-name="P7" loext:marker-style-name="T18"><text:span text:style-name="T19">第四章：</text:span><text:span text:style-name="T20">Kruskal </text:span><text:span text:style-name="T19">演算法 ── 圖解 </text:span><text:span text:style-name="T20">+ Union-Find + C++ </text:span><text:span text:style-name="T19">程式碼</text:span></text:p>
            <text:p text:style-name="P7" loext:marker-style-name="T18"><text:span text:style-name="T19">第五章：</text:span><text:span text:style-name="T20">Sollin </text:span><text:span text:style-name="T19">演算法 ── 圖解 </text:span><text:span text:style-name="T20">+ </text:span><text:span text:style-name="T19">逐步推導 </text:span><text:span text:style-name="T20">+ C++ </text:span><text:span text:style-name="T19">程式碼</text:span></text:p>
            <text:p text:style-name="P7" loext:marker-style-name="T18"><text:span text:style-name="T19">第六章：</text:span><text:span text:style-name="T20">113</text:span><text:span text:style-name="T19">閩 </text:span><text:span text:style-name="T20">Q5 </text:span><text:span text:style-name="T19">公職真題完整解題</text:span></text:p>
            <text:p text:style-name="P7" loext:marker-style-name="T18"><text:span text:style-name="T19">第七章：考試速查卡（背誦版）</text:span><text:span text:style-name="T18"/></text:p>
          </table:table-cell>
        </table:table-row>
      </table:table>
      <text:p text:style-name="P5"/>
      <text:p text:style-name="Standard"/>
      <text:h text:style-name="P8" text:outline-level="1" loext:marker-style-name="T21"><text:span text:style-name="T22">一、</text:span><text:span text:style-name="T21">MST </text:span><text:span text:style-name="T22">基本概念 ── 新手從這裡開始</text:span></text:h>
      <text:p text:style-name="P5"/>
      <text:h text:style-name="P9" text:outline-level="2" loext:marker-style-name="T23"><text:span text:style-name="T23">1-1 </text:span><text:span text:style-name="T24">先搞懂名詞：圖、節點、邊、權重</text:span></text:h>
      <text:p text:style-name="P5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6" loext:marker-style-name="T25"><text:span text:style-name="T26">📌 </text:span><text:span text:style-name="T27">新手名詞解釋（一定要先懂這些！）</text:span></text:p>
            <text:p text:style-name="P7"><text:span text:style-name="T28">圖（</text:span><text:span text:style-name="T29">Graph</text:span><text:span text:style-name="T28">）：</text:span><text:span text:style-name="T19">由「點」和「線」組成的一種資料結構。例如：城市地圖就是一個圖。</text:span></text:p>
            <text:p text:style-name="P7"><text:span text:style-name="T28">節點（</text:span><text:span text:style-name="T29">Node / Vertex</text:span><text:span text:style-name="T28">）：</text:span><text:span text:style-name="T19">圖裡面的每個點。例如：城市 </text:span><text:span text:style-name="T20">A</text:span><text:span text:style-name="T19">、</text:span><text:span text:style-name="T20">B</text:span><text:span text:style-name="T19">、</text:span><text:span text:style-name="T20">C</text:span><text:span text:style-name="T19">。</text:span></text:p>
            <text:p text:style-name="P7"><text:span text:style-name="T28">邊（</text:span><text:span text:style-name="T29">Edge</text:span><text:span text:style-name="T28">）：</text:span><text:span text:style-name="T19">連接兩個節點的線段。例如：</text:span><text:span text:style-name="T20">A </text:span><text:span text:style-name="T19">到 </text:span><text:span text:style-name="T20">B </text:span><text:span text:style-name="T19">的道路。</text:span></text:p>
            <text:p text:style-name="P7"><text:span text:style-name="T28">權重（</text:span><text:span text:style-name="T29">Weight</text:span><text:span text:style-name="T28">）：</text:span><text:span text:style-name="T19">邊上的數字，代表距離、費用、時間等。例如：</text:span><text:span text:style-name="T20">A </text:span><text:span text:style-name="T19">到 </text:span><text:span text:style-name="T20">B </text:span><text:span text:style-name="T19">要走 </text:span><text:span text:style-name="T20">3 </text:span><text:span text:style-name="T19">公里。</text:span></text:p>
            <text:p text:style-name="P10"><text:span text:style-name="T28">連通圖（</text:span><text:span text:style-name="T29">Connected Graph</text:span><text:span text:style-name="T28">）：</text:span><text:span text:style-name="T19">任兩個節點之間都找得到路徑可以互達，不能有孤立點。</text:span></text:p>
          </table:table-cell>
        </table:table-row>
      </table:table>
      <text:p text:style-name="P5"/>
      <text:h text:style-name="P9" text:outline-level="2" loext:marker-style-name="T23"><text:span text:style-name="T23">1-2 MST </text:span><text:span text:style-name="T24">的定義</text:span></text:h>
      <text:p text:style-name="P5"/>
      <text:p text:style-name="P11" loext:marker-style-name="T30"><text:span text:style-name="T31">想像你要在 </text:span><text:span text:style-name="T32">4 </text:span><text:span text:style-name="T31">個城市之間鋪設電纜，每兩個城市之間都可以連線，但每條線有建設費用。你想「</text:span><text:span text:style-name="T33">用最低費用</text:span><text:span text:style-name="T31">，</text:span><text:span text:style-name="T34">讓每個城市都連通</text:span><text:span text:style-name="T31">」── 這就是 </text:span><text:span text:style-name="T32">MST </text:span><text:span text:style-name="T31">要解決的問題！</text:span></text:p>
      <text:p text:style-name="P5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2" loext:marker-style-name="T15"><text:span text:style-name="T16">MST</text:span><text:span text:style-name="T17">（最小生成樹）</text:span><text:span text:style-name="T16">= </text:span><text:span text:style-name="T17">生成樹（</text:span><text:span text:style-name="T16">Spanning Tree</text:span><text:span text:style-name="T17">）</text:span><text:span text:style-name="T16">+ </text:span><text:span text:style-name="T35">總權重最小（</text:span><text:span text:style-name="T36">Minimum</text:span><text:span text:style-name="T35">）</text:span></text:p>
          </table:table-cell>
        </table:table-row>
      </table:table>
      <text:p text:style-name="P5"/>
      <text:p text:style-name="P13" loext:marker-style-name="T25"><text:span text:style-name="T27">條件 </text:span><text:span text:style-name="T26">1</text:span><text:span text:style-name="T27">：</text:span><text:span text:style-name="T37">覆蓋所有節點（</text:span><text:span text:style-name="T38">Spanning</text:span><text:span text:style-name="T37">）</text:span></text:p>
      <text:p text:style-name="P14" loext:marker-style-name="T30"><text:span text:style-name="T39">每個城市都必須被電纜接到</text:span><text:span text:style-name="T31">，不能有孤立的城市存在。</text:span>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15" loext:marker-style-name="T40"><text:span text:style-name="T41">❌ </text:span><text:span text:style-name="T42">不是生成樹</text:span></text:p>
            <text:p text:style-name="P16" loext:marker-style-name="T43"><text:span text:style-name="T43">A──B</text:span><text:span text:style-name="T43"/></text:p>
            <text:p text:style-name="P17" loext:marker-style-name="T43"><text:span text:style-name="T43"><text:s text:c="4"/>C──D</text:span><text:span text:style-name="T43"/></text:p>
            <text:p text:style-name="P5" loext:marker-style-name="T44"><text:span text:style-name="T45">A</text:span><text:span text:style-name="T46">、</text:span><text:span text:style-name="T45">B </text:span><text:span text:style-name="T46">一組，</text:span><text:span text:style-name="T45">C</text:span><text:span text:style-name="T46">、</text:span><text:span text:style-name="T45">D </text:span><text:span text:style-name="T46">另一組，無法互通。</text:span></text:p>
          </table:table-cell>
          <table:table-cell table:style-name="表格5.B1" office:value-type="string">
            <text:p text:style-name="P15" loext:marker-style-name="T47"><text:span text:style-name="T48">✅ </text:span><text:span text:style-name="T49">覆蓋所有節點</text:span></text:p>
            <text:p text:style-name="P16" loext:marker-style-name="T43"><text:span text:style-name="T43">A──B</text:span><text:span text:style-name="T43"/></text:p>
            <text:p text:style-name="P16" loext:marker-style-name="T43"><text:span text:style-name="T43">|</text:span><text:span text:style-name="T43"/></text:p>
            <text:p text:style-name="P17" loext:marker-style-name="T43"><text:span text:style-name="T43">C──D</text:span><text:span text:style-name="T43"/></text:p>
            <text:p text:style-name="P5" loext:marker-style-name="T50"><text:span text:style-name="T51">A</text:span><text:span text:style-name="T52">、</text:span><text:span text:style-name="T51">B</text:span><text:span text:style-name="T52">、</text:span><text:span text:style-name="T51">C</text:span><text:span text:style-name="T52">、</text:span><text:span text:style-name="T51">D </text:span><text:span text:style-name="T52">全部被電纜接到。</text:span></text:p>
          </table:table-cell>
        </table:table-row>
      </table:table>
      <text:p text:style-name="P5"/>
      <text:p text:style-name="P13" loext:marker-style-name="T25"><text:span text:style-name="T27">條件 </text:span><text:span text:style-name="T26">2</text:span><text:span text:style-name="T27">：</text:span><text:span text:style-name="T37">不能有迴路（</text:span><text:span text:style-name="T38">Cycle</text:span><text:span text:style-name="T37">）</text:span></text:p>
      <text:p text:style-name="P14" loext:marker-style-name="T30"><text:span text:style-name="T31">電纜不能繞成圈。</text:span><text:span text:style-name="T53">只要有迴路，就代表有一條邊是多餘的</text:span><text:span text:style-name="T31">、可以省去的。</text:span>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15" loext:marker-style-name="T40"><text:span text:style-name="T41">❌ </text:span><text:span text:style-name="T42">有迴路，不合法</text:span></text:p>
            <text:p text:style-name="P16" loext:marker-style-name="T43"><text:span text:style-name="T43">A──B</text:span><text:span text:style-name="T43"/></text:p>
            <text:p text:style-name="P16" loext:marker-style-name="T43"><text:span text:style-name="T43">| <text:s/>|</text:span><text:span text:style-name="T43"/></text:p>
            <text:p text:style-name="P17" loext:marker-style-name="T43"><text:span text:style-name="T43">D──C</text:span><text:span text:style-name="T43"/></text:p>
            <text:p text:style-name="P5" loext:marker-style-name="T44"><text:span text:style-name="T45">A→B→C→D→A </text:span><text:span text:style-name="T46">可以繞一圈，形成 </text:span><text:span text:style-name="T45">Cycle</text:span><text:span text:style-name="T46">。</text:span></text:p>
          </table:table-cell>
          <table:table-cell table:style-name="表格6.B1" office:value-type="string">
            <text:p text:style-name="P15" loext:marker-style-name="T47"><text:span text:style-name="T48">✅ </text:span><text:span text:style-name="T49">去掉一條，仍連通</text:span></text:p>
            <text:p text:style-name="P16" loext:marker-style-name="T43"><text:span text:style-name="T43">A──B</text:span><text:span text:style-name="T43"/></text:p>
            <text:p text:style-name="P16" loext:marker-style-name="T43"><text:span text:style-name="T43"><text:s text:c="3"/>|</text:span><text:span text:style-name="T43"/></text:p>
            <text:p text:style-name="P17" loext:marker-style-name="T43"><text:span text:style-name="T43">D──C</text:span><text:span text:style-name="T43"/></text:p>
            <text:p text:style-name="P5" loext:marker-style-name="T50"><text:span text:style-name="T52">移除最貴的邊，四個城市依然可以互達。</text:span><text:span text:style-name="T50"/></text:p>
          </table:table-cell>
        </table:table-row>
      </table:table>
      <text:p text:style-name="P5"/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4" loext:marker-style-name="T54"><text:span text:style-name="T55">為什麼有迴路的圖一定不能是生成樹（更不能是 </text:span><text:span text:style-name="T56">MST</text:span><text:span text:style-name="T55">）？</text:span></text:p>
            <text:p text:style-name="P18" loext:marker-style-name="T30"><text:span text:style-name="T31">根本原因：</text:span><text:span text:style-name="T39">生成樹的定義要求「無 </text:span><text:span text:style-name="T57">Cycle</text:span><text:span text:style-name="T39">」</text:span><text:span text:style-name="T31">。</text:span><text:span text:style-name="T33">有迴路的連通圖不是 </text:span><text:span text:style-name="T58">Tree</text:span><text:span text:style-name="T33">，所以直接不符合生成樹的定義</text:span><text:span text:style-name="T31">。</text:span></text:p>
            <text:p text:style-name="P19" loext:marker-style-name="T18"/>
            <text:p text:style-name="P20" loext:marker-style-name="T30"><text:span text:style-name="T31">進一步說明（以 </text:span><text:span text:style-name="T32">A─B─C─A </text:span><text:span text:style-name="T31">三角形為例）：</text:span></text:p>
            <text:p text:style-name="P20" loext:marker-style-name="T30"><text:span text:style-name="T32">• </text:span><text:span text:style-name="T31">去掉其中任何一條邊，三個城市仍然透過另外兩條邊互通</text:span></text:p>
            <text:p text:style-name="P21" loext:marker-style-name="T30"><text:span text:style-name="T32">• </text:span><text:span text:style-name="T31">刪掉最貴那條邊後，費用更低且連通性不變</text:span></text:p>
            <text:p text:style-name="P21" loext:marker-style-name="T30"><text:span text:style-name="T32">• </text:span><text:span text:style-name="T31">所以</text:span><text:span text:style-name="T59">有 </text:span><text:span text:style-name="T60">Cycle </text:span><text:span text:style-name="T59">的圖裡，至少有一條邊是「可以刪掉且不影響連通」的多餘邊</text:span></text:p>
            <text:p text:style-name="P19" loext:marker-style-name="T18"/>
            <text:p text:style-name="P22" loext:marker-style-name="T54"><text:soft-page-break/><text:span text:style-name="T56">➡ </text:span><text:span text:style-name="T55">有迴路 </text:span><text:span text:style-name="T56">= </text:span><text:span text:style-name="T55">不是生成樹 </text:span><text:span text:style-name="T56">= </text:span><text:span text:style-name="T55">一定不是 </text:span><text:span text:style-name="T56">MST</text:span></text:p>
            <text:p text:style-name="P23" loext:marker-style-name="T61"><text:span text:style-name="T62">（不是因為「費用一定更高」，而是因為根本不符合 </text:span><text:span text:style-name="T63">Tree </text:span><text:span text:style-name="T62">的定義）</text:span></text:p>
          </table:table-cell>
        </table:table-row>
      </table:table>
      <text:p text:style-name="P5"/>
      <text:p text:style-name="P13" loext:marker-style-name="T25"><text:span text:style-name="T27">由以上兩個條件推出的重要結論：</text:span><text:span text:style-name="T64">邊數一定是 </text:span><text:span text:style-name="T65">V−1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4" loext:marker-style-name="T30"><text:span text:style-name="T31">「</text:span><text:span text:style-name="T32">V−1 </text:span><text:span text:style-name="T31">條邊」不是第三個獨立條件，而是由「覆蓋所有節點 </text:span><text:span text:style-name="T32">+ </text:span><text:span text:style-name="T31">無 </text:span><text:span text:style-name="T32">Cycle</text:span><text:span text:style-name="T31">」自然推導出來的結果。</text:span></text:p>
            <text:p text:style-name="P24" loext:marker-style-name="T66"><text:span text:style-name="T67">對 </text:span><text:span text:style-name="T68">V </text:span><text:span text:style-name="T67">個節點而言：</text:span></text:p>
          </table:table-cell>
        </table:table-row>
      </table:table>
      <text:p text:style-name="P5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15" loext:marker-style-name="T40"><text:span text:style-name="T42">邊數 </text:span><text:span text:style-name="T41">&lt; V−1 <text:s/>→ <text:s/></text:span><text:span text:style-name="T42">一定不連通</text:span></text:p>
            <text:p text:style-name="P25" loext:marker-style-name="T30"><text:span text:style-name="T31">例：</text:span><text:span text:style-name="T32">4 </text:span><text:span text:style-name="T31">個城市，只有 </text:span><text:span text:style-name="T32">2 </text:span><text:span text:style-name="T31">條邊：</text:span></text:p>
            <text:p text:style-name="P17" loext:marker-style-name="T43"><text:span text:style-name="T43">A──B <text:s text:c="4"/>C──D</text:span><text:span text:style-name="T43"/></text:p>
            <text:p text:style-name="P16" loext:marker-style-name="T30"><text:span text:style-name="T32">A</text:span><text:span text:style-name="T31">、</text:span><text:span text:style-name="T32">B </text:span><text:span text:style-name="T31">是一組，</text:span><text:span text:style-name="T32">C</text:span><text:span text:style-name="T31">、</text:span><text:span text:style-name="T32">D </text:span><text:span text:style-name="T31">是另一組，永遠無法互達。</text:span></text:p>
          </table:table-cell>
          <table:table-cell table:style-name="表格9.A1" office:value-type="string">
            <text:p text:style-name="P15" loext:marker-style-name="T40"><text:span text:style-name="T42">邊數 </text:span><text:span text:style-name="T41">&gt; V−1 <text:s/>→ <text:s/></text:span><text:span text:style-name="T42">一定有 </text:span><text:span text:style-name="T41">Cycle</text:span></text:p>
            <text:p text:style-name="P25" loext:marker-style-name="T30"><text:span text:style-name="T31">例：</text:span><text:span text:style-name="T32">4 </text:span><text:span text:style-name="T31">個城市，有 </text:span><text:span text:style-name="T32">4 </text:span><text:span text:style-name="T31">條邊：</text:span></text:p>
            <text:p text:style-name="P17" loext:marker-style-name="T43"><text:span text:style-name="T43">A──B <text:s/>| <text:s/>| <text:s/>D──C</text:span><text:span text:style-name="T43"/></text:p>
            <text:p text:style-name="P16" loext:marker-style-name="T30"><text:span text:style-name="T32">A→B→C→D→A </text:span><text:span text:style-name="T31">形成迴路，必定有多餘的邊。</text:span></text:p>
          </table:table-cell>
        </table:table-row>
      </table:table>
      <text:p text:style-name="P5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4" loext:marker-style-name="T69"><text:span text:style-name="T70">✅ </text:span><text:span text:style-name="T71">重要定理：</text:span></text:p>
            <text:p text:style-name="P12" loext:marker-style-name="T72"><text:span text:style-name="T73">「連通 </text:span><text:span text:style-name="T74">+ </text:span><text:span text:style-name="T73">無 </text:span><text:span text:style-name="T74">Cycle</text:span><text:span text:style-name="T73">」 <text:s/>⟺ <text:s/>「</text:span><text:span text:style-name="T75">恰好 </text:span><text:span text:style-name="T76">V−1 </text:span><text:span text:style-name="T75">條邊</text:span><text:span text:style-name="T73">」</text:span></text:p>
            <text:p text:style-name="P26" loext:marker-style-name="T18"><text:span text:style-name="T19">例：</text:span><text:span text:style-name="T20">4 </text:span><text:span text:style-name="T19">個節點，</text:span><text:span text:style-name="T77">MST </text:span><text:span text:style-name="T78">必有 </text:span><text:span text:style-name="T77">4−1 = 3 </text:span><text:span text:style-name="T78">條邊</text:span><text:span text:style-name="T19">。</text:span></text:p>
          </table:table-cell>
        </table:table-row>
      </table:table>
      <text:p text:style-name="P5"/>
      <text:p text:style-name="P13" loext:marker-style-name="T25"><text:span text:style-name="T27">條件 </text:span><text:span text:style-name="T26">3</text:span><text:span text:style-name="T27">：</text:span><text:span text:style-name="T37">在所有生成樹中，選總權重最小的那棵（</text:span><text:span text:style-name="T38">Minimum</text:span><text:span text:style-name="T37">）</text:span></text:p>
      <text:p text:style-name="P14" loext:marker-style-name="T30"><text:span text:style-name="T79">滿足條件 </text:span><text:span text:style-name="T80">1 </text:span><text:span text:style-name="T79">和條件 </text:span><text:span text:style-name="T80">2 </text:span><text:span text:style-name="T79">的生成樹可能有很多棵</text:span><text:span text:style-name="T31">，</text:span><text:span text:style-name="T32">MST </text:span><text:span text:style-name="T31">要從中</text:span><text:span text:style-name="T39">選出總費用最低的那一棵</text:span><text:span text:style-name="T31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6" loext:marker-style-name="T81"><text:span text:style-name="T82">舉例：</text:span><text:span text:style-name="T83">4 </text:span><text:span text:style-name="T82">個城市，邊的費用如下</text:span></text:p>
            <text:p text:style-name="P15" loext:marker-style-name="T43"><text:span text:style-name="T43">AB = 1，BD = 2，CD = 3，AC = 4</text:span><text:span text:style-name="T43"/></text:p>
            <text:p text:style-name="P5" loext:marker-style-name="T47"><text:span text:style-name="T49">方案 </text:span><text:span text:style-name="T48">A</text:span><text:span text:style-name="T49">：</text:span><text:span text:style-name="T48">AB + BD + CD = 1 + 2 + 3 = 6 <text:s/>✅ </text:span><text:span text:style-name="T49">費用最低，這就是 </text:span><text:span text:style-name="T48">MST</text:span></text:p>
            <text:p text:style-name="P27" loext:marker-style-name="T84"><text:span text:style-name="T85">方案 </text:span><text:span text:style-name="T86">B</text:span><text:span text:style-name="T85">：</text:span><text:span text:style-name="T86">AB + BD + AC = 1 + 2 + 4 = 7 <text:s/>❌ </text:span><text:span text:style-name="T85">雖然合法，但費用較高</text:span></text:p>
          </table:table-cell>
        </table:table-row>
      </table:table>
      <text:p text:style-name="P5"/>
      <text:p text:style-name="P13" loext:marker-style-name="T25"><text:span text:style-name="T27">一句話記憶 </text:span><text:span text:style-name="T26">&amp; </text:span><text:span text:style-name="T27">邏輯順序總結</text:span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8" loext:marker-style-name="T72"><text:span text:style-name="T87">MST</text:span><text:span text:style-name="T74"> = </text:span><text:span text:style-name="T88">覆蓋所有節點</text:span><text:span text:style-name="T73"> <text:s/></text:span><text:span text:style-name="T74">+ <text:s/></text:span><text:span text:style-name="T89">沒有 </text:span><text:span text:style-name="T90">Cycle</text:span><text:span text:style-name="T74"> <text:s/>+ <text:s/></text:span><text:span text:style-name="T75">總權重最小</text:span></text:p>
            <text:p text:style-name="P29" loext:marker-style-name="T91"><text:span text:style-name="T92">且一定具有：</text:span><text:span text:style-name="T33">邊數 </text:span><text:span text:style-name="T58">E = V − 1</text:span><text:span text:style-name="T92">（推論結果，非獨立條件）</text:span></text:p>
          </table:table-cell>
        </table:table-row>
      </table:table>
      <text:p text:style-name="P5"/>
      <text:p text:style-name="P30" loext:marker-style-name="T81"><text:span text:style-name="T82">正確的思考順序：</text:span><text:span text:style-name="T81"/></text:p>
      <text:p text:style-name="P31" loext:marker-style-name="T18"><text:span text:style-name="T20">① </text:span><text:span text:style-name="T93">覆蓋所有節點</text:span><text:span text:style-name="T19">（每個城市都要接到）</text:span></text:p>
      <text:p text:style-name="P23" loext:marker-style-name="T61"><text:span text:style-name="T63">↓</text:span><text:span text:style-name="T61"/></text:p>
      <text:p text:style-name="P31" loext:marker-style-name="T18"><text:span text:style-name="T20">② </text:span><text:span text:style-name="T94">不能有 </text:span><text:span text:style-name="T95">Cycle</text:span><text:span text:style-name="T19">（有環就有多餘的邊，去掉更省）</text:span></text:p>
      <text:p text:style-name="P23" loext:marker-style-name="T61"><text:span text:style-name="T63">↓</text:span><text:span text:style-name="T61"/></text:p>
      <text:p text:style-name="P31" loext:marker-style-name="T18"><text:span text:style-name="T20">③ </text:span><text:span text:style-name="T19">因此</text:span><text:span text:style-name="T96">邊數一定是 </text:span><text:span text:style-name="T97">V−1</text:span><text:span text:style-name="T19">（自然推導）</text:span></text:p>
      <text:p text:style-name="P23" loext:marker-style-name="T61"><text:span text:style-name="T63">↓</text:span><text:span text:style-name="T61"/></text:p>
      <text:p text:style-name="P31" loext:marker-style-name="T18"><text:span text:style-name="T20">④ </text:span><text:span text:style-name="T19">在所有符合以上條件的生成樹中，挑</text:span><text:span text:style-name="T98">總權重最小者</text:span></text:p>
      <text:p text:style-name="P23" loext:marker-style-name="T61"><text:span text:style-name="T63">↓</text:span><text:span text:style-name="T61"/></text:p>
      <text:p text:style-name="P31" loext:marker-style-name="T47"><text:span text:style-name="T48">✅ </text:span><text:span text:style-name="T49">就是 </text:span><text:span text:style-name="T48">MST</text:span></text:p>
      <text:p text:style-name="P5"/>
      <text:h text:style-name="P9" text:outline-level="2" loext:marker-style-name="T23"><text:span text:style-name="T23">1-3 </text:span><text:span text:style-name="T24">圖解：原始圖 </text:span><text:span text:style-name="T23">vs MST</text:span></text:h>
      <text:p text:style-name="P5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6" loext:marker-style-name="T99"><text:span text:style-name="T99">原始圖（所有邊）： <text:s text:c="18"/>MST（花最少錢連通所有城市）：</text:span><text:span text:style-name="T99"/></text:p>
            <text:p text:style-name="P32" loext:marker-style-name="T99"><text:soft-page-break/><text:span text:style-name="T99"><text:s text:c="9"/>A <text:s text:c="31"/>A</text:span><text:span text:style-name="T99"/></text:p>
            <text:p text:style-name="P32" loext:marker-style-name="T99"><text:span text:style-name="T99"><text:s text:c="8"/>/ \ <text:s text:c="29"/>/</text:span><text:span text:style-name="T99"/></text:p>
            <text:p text:style-name="P32" loext:marker-style-name="T99"><text:span text:style-name="T99"><text:s text:c="7"/>1 <text:s text:c="2"/>4 <text:s text:c="4"/>← 4條邊 <text:s text:c="14"/>1 <text:s text:c="5"/>← 只選3條最便宜的邊</text:span><text:span text:style-name="T99"/></text:p>
            <text:p text:style-name="P32" loext:marker-style-name="T99"><text:span text:style-name="T99"><text:s text:c="6"/>/ <text:s text:c="4"/>\ <text:s text:c="25"/>/</text:span><text:span text:style-name="T99"/></text:p>
            <text:p text:style-name="P32" loext:marker-style-name="T99"><text:span text:style-name="T99"><text:s text:c="5"/>B --2-- C <text:s text:c="23"/>B --2-- C</text:span><text:span text:style-name="T99"/></text:p>
            <text:p text:style-name="P32" loext:marker-style-name="T99"><text:span text:style-name="T99"><text:s text:c="6"/>\ <text:s text:c="4"/>/ <text:s text:c="33"/>\</text:span><text:span text:style-name="T99"/></text:p>
            <text:p text:style-name="P32" loext:marker-style-name="T99"><text:span text:style-name="T99"><text:s text:c="7"/>5 <text:s text:c="2"/>3 <text:s text:c="35"/>3</text:span><text:span text:style-name="T99"/></text:p>
            <text:p text:style-name="P32" loext:marker-style-name="T99"><text:span text:style-name="T99"><text:s text:c="8"/>\ / <text:s text:c="37"/>\</text:span><text:span text:style-name="T99"/></text:p>
            <text:p text:style-name="P33" loext:marker-style-name="T99"><text:span text:style-name="T99"><text:s text:c="9"/>D <text:s text:c="39"/>D</text:span><text:span text:style-name="T99"/></text:p>
            <text:p text:style-name="P16" loext:marker-style-name="T99"><text:span text:style-name="T99">邊清單：AB=1, AC=4, BC=2, BD=5, CD=3 <text:s text:c="2"/>✅ MST 邊：AB=1, BC=2, CD=3</text:span><text:span text:style-name="T99"/></text:p>
            <text:p text:style-name="P34" loext:marker-style-name="T99"><text:span text:style-name="T99">總費用 = 1+2+3 = 6（最省！）</text:span><text:span text:style-name="T99"/></text:p>
            <text:p text:style-name="P16" loext:marker-style-name="T44"><text:span text:style-name="T45">❌ </text:span><text:span text:style-name="T46">不選 </text:span><text:span text:style-name="T45">AC=4</text:span><text:span text:style-name="T46">：若選了，</text:span><text:span text:style-name="T45">A─B─C─A </text:span><text:span text:style-name="T46">形成迴路，而且費用還比較貴</text:span></text:p>
            <text:p text:style-name="P16" loext:marker-style-name="T44"><text:span text:style-name="T45">❌ </text:span><text:span text:style-name="T46">不選 </text:span><text:span text:style-name="T45">BD=5</text:span><text:span text:style-name="T46">：若選了，</text:span><text:span text:style-name="T45">B─C─D─B </text:span><text:span text:style-name="T46">形成迴路，同樣多此一舉</text:span></text:p>
            <text:p text:style-name="P27" loext:marker-style-name="T100"><text:span text:style-name="T101">✅ </text:span><text:span text:style-name="T102">驗證：</text:span><text:span text:style-name="T101">4</text:span><text:span text:style-name="T102">個節點 → </text:span><text:span text:style-name="T101">V-1 = 3 </text:span><text:span text:style-name="T102">條邊 <text:s/>✅ <text:s/>無迴路 <text:s/>✅ <text:s text:c="2"/>覆蓋 </text:span><text:span text:style-name="T101">A,B,C,D <text:s/>✅</text:span></text:p>
          </table:table-cell>
        </table:table-row>
      </table:table>
      <text:p text:style-name="P5"/>
      <text:h text:style-name="P9" text:outline-level="2" loext:marker-style-name="T23"><text:span text:style-name="T23">1-4 </text:span><text:span text:style-name="T24">為什麼連通圖才有 </text:span><text:span text:style-name="T23">MST</text:span><text:span text:style-name="T24">？</text:span></text:h>
      <text:p text:style-name="P5"/>
      <text:p text:style-name="P11" loext:marker-style-name="T30"><text:span text:style-name="T31">假設圖有兩個完全分開的部分（</text:span><text:span text:style-name="T32">A-B </text:span><text:span text:style-name="T31">和 </text:span><text:span text:style-name="T32">C-D</text:span><text:span text:style-name="T31">，中間沒有任何邊相連），那麼 </text:span><text:span text:style-name="T32">A </text:span><text:span text:style-name="T31">永遠無法到達 </text:span><text:span text:style-name="T32">C</text:span><text:span text:style-name="T31">，也就不可能用任何方式把它們都連起來，</text:span><text:span text:style-name="T32">MST </text:span><text:span text:style-name="T31">就不存在了。這時候只能各自做「最小擴張森林（</text:span><text:span text:style-name="T32">Minimum Spanning Forest</text:span><text:span text:style-name="T31">）」。</text:span></text:p>
      <text:p text:style-name="P5"/>
      <text:p text:style-name="Standard"/>
      <text:h text:style-name="P8" text:outline-level="1" loext:marker-style-name="T21"><text:span text:style-name="T22">二、三種 </text:span><text:span text:style-name="T21">MST </text:span><text:span text:style-name="T22">演算法快速比較</text:span></text:h>
      <text:p text:style-name="P5"/>
      <text:p text:style-name="P11" loext:marker-style-name="T30"><text:span text:style-name="T31">求 </text:span><text:span text:style-name="T32">MST </text:span><text:span text:style-name="T31">有三種主流演算法，它們的「切入點」不同：</text:span><text:span text:style-name="T103">Prim </text:span><text:span text:style-name="T104">從點出發</text:span><text:span text:style-name="T31">、</text:span><text:span text:style-name="T105">Kruskal </text:span><text:span text:style-name="T106">從邊出發</text:span><text:span text:style-name="T31">、</text:span><text:span text:style-name="T107">Sollin </text:span><text:span text:style-name="T108">全體同時出發</text:span><text:span text:style-name="T31">。</text:span></text:p>
      <text:p text:style-name="P5"/>
      <table:table table:name="表格14" table:style-name="表格14">
        <table:table-column table:style-name="表格14.A" table:number-columns-repeated="5"/>
        <table:table-row table:style-name="表格14.1">
          <table:table-cell table:style-name="表格14.A1" office:value-type="string">
            <text:p text:style-name="P5" loext:marker-style-name="T109"><text:span text:style-name="T110">比較項目</text:span><text:span text:style-name="T109"/></text:p>
          </table:table-cell>
          <table:table-cell table:style-name="表格14.A1" office:value-type="string">
            <text:p text:style-name="P5" loext:marker-style-name="T109"><text:span text:style-name="T111">Prim</text:span><text:span text:style-name="T109"/></text:p>
          </table:table-cell>
          <table:table-cell table:style-name="表格14.A1" office:value-type="string">
            <text:p text:style-name="P5" loext:marker-style-name="T109"><text:span text:style-name="T111">Kruskal</text:span><text:span text:style-name="T109"/></text:p>
          </table:table-cell>
          <table:table-cell table:style-name="表格14.A1" office:value-type="string">
            <text:p text:style-name="P5" loext:marker-style-name="T109"><text:span text:style-name="T111">Sollin</text:span><text:span text:style-name="T110">（</text:span><text:span text:style-name="T111">Borůvka</text:span><text:span text:style-name="T110">）</text:span></text:p>
          </table:table-cell>
          <table:table-cell table:style-name="表格14.A1" office:value-type="string">
            <text:p text:style-name="P5" loext:marker-style-name="T109"><text:span text:style-name="T111">MST </text:span><text:span text:style-name="T110">共同特性</text:span></text:p>
          </table:table-cell>
        </table:table-row>
        <table:table-row table:style-name="表格14.1">
          <table:table-cell table:style-name="表格14.A2" office:value-type="string">
            <text:p text:style-name="P5" loext:marker-style-name="T112"><text:span text:style-name="T113">出發點</text:span><text:span text:style-name="T112"/></text:p>
          </table:table-cell>
          <table:table-cell table:style-name="表格14.A2" office:value-type="string">
            <text:p text:style-name="P5" loext:marker-style-name="T114"><text:span text:style-name="T115">從「一個節點」開始往外長</text:span><text:span text:style-name="T114"/></text:p>
          </table:table-cell>
          <table:table-cell table:style-name="表格14.A2" office:value-type="string">
            <text:p text:style-name="P5" loext:marker-style-name="T116"><text:span text:style-name="T117">從「最小邊」開始一條條挑</text:span><text:span text:style-name="T116"/></text:p>
          </table:table-cell>
          <table:table-cell table:style-name="表格14.A2" office:value-type="string">
            <text:p text:style-name="P5" loext:marker-style-name="T118"><text:span text:style-name="T119">從「所有節點」同時出發</text:span><text:span text:style-name="T118"/></text:p>
          </table:table-cell>
          <table:table-cell table:style-name="表格14.A2" office:value-type="string">
            <text:p text:style-name="P5" loext:marker-style-name="T112"><text:span text:style-name="T120">V-1 </text:span><text:span text:style-name="T113">條邊，無 </text:span><text:span text:style-name="T120">Cycle</text:span></text:p>
          </table:table-cell>
        </table:table-row>
        <table:table-row table:style-name="表格14.1">
          <table:table-cell table:style-name="表格14.A3" office:value-type="string">
            <text:p text:style-name="P5" loext:marker-style-name="T112"><text:span text:style-name="T113">核心工具</text:span><text:span text:style-name="T112"/></text:p>
          </table:table-cell>
          <table:table-cell table:style-name="表格14.A3" office:value-type="string">
            <text:p text:style-name="P5" loext:marker-style-name="T112"><text:span text:style-name="T120">Min-Heap </text:span><text:span text:style-name="T113">或矩陣</text:span></text:p>
          </table:table-cell>
          <table:table-cell table:style-name="表格14.A3" office:value-type="string">
            <text:p text:style-name="P5" loext:marker-style-name="T112"><text:span text:style-name="T120">Union-Find</text:span><text:span text:style-name="T113">（並查集）</text:span></text:p>
          </table:table-cell>
          <table:table-cell table:style-name="表格14.A3" office:value-type="string">
            <text:p text:style-name="P5" loext:marker-style-name="T112"><text:span text:style-name="T120">Component </text:span><text:span text:style-name="T113">清單</text:span></text:p>
          </table:table-cell>
          <table:table-cell table:style-name="表格14.A3" office:value-type="string">
            <text:p text:style-name="P5" loext:marker-style-name="T112"><text:span text:style-name="T113">連通圖才存在</text:span><text:span text:style-name="T112"/></text:p>
          </table:table-cell>
        </table:table-row>
        <table:table-row table:style-name="表格14.1">
          <table:table-cell table:style-name="表格14.A2" office:value-type="string">
            <text:p text:style-name="P5" loext:marker-style-name="T121"><text:span text:style-name="T122">時間複雜度</text:span><text:span text:style-name="T121"/></text:p>
          </table:table-cell>
          <table:table-cell table:style-name="表格14.A2" office:value-type="string">
            <text:p text:style-name="P5" loext:marker-style-name="T121"><text:span text:style-name="T123">O(V²) </text:span><text:span text:style-name="T122">或 </text:span><text:span text:style-name="T123">O(E log V)</text:span></text:p>
          </table:table-cell>
          <table:table-cell table:style-name="表格14.A2" office:value-type="string">
            <text:p text:style-name="P5" loext:marker-style-name="T121"><text:span text:style-name="T123">O(E log E)</text:span><text:span text:style-name="T121"/></text:p>
          </table:table-cell>
          <table:table-cell table:style-name="表格14.A2" office:value-type="string">
            <text:p text:style-name="P5" loext:marker-style-name="T121"><text:span text:style-name="T123">O(E log V)</text:span><text:span text:style-name="T121"/></text:p>
          </table:table-cell>
          <table:table-cell table:style-name="表格14.A2" office:value-type="string">
            <text:p text:style-name="P5" loext:marker-style-name="T112"><text:span text:style-name="T120">—</text:span><text:span text:style-name="T112"/></text:p>
          </table:table-cell>
        </table:table-row>
        <table:table-row table:style-name="表格14.1">
          <table:table-cell table:style-name="表格14.A3" office:value-type="string">
            <text:p text:style-name="P5" loext:marker-style-name="T124"><text:span text:style-name="T125">最適圖型</text:span><text:span text:style-name="T124"/></text:p>
          </table:table-cell>
          <table:table-cell table:style-name="表格14.A3" office:value-type="string">
            <text:p text:style-name="P5" loext:marker-style-name="T124"><text:span text:style-name="T125">稠密圖（邊很多）</text:span><text:span text:style-name="T124"/></text:p>
          </table:table-cell>
          <table:table-cell table:style-name="表格14.A3" office:value-type="string">
            <text:p text:style-name="P5" loext:marker-style-name="T124"><text:span text:style-name="T125">稀疏圖（邊很少）</text:span><text:span text:style-name="T124"/></text:p>
          </table:table-cell>
          <table:table-cell table:style-name="表格14.A3" office:value-type="string">
            <text:p text:style-name="P5" loext:marker-style-name="T124"><text:span text:style-name="T125">平行</text:span><text:span text:style-name="T126">/</text:span><text:span text:style-name="T125">分散式計算</text:span></text:p>
          </table:table-cell>
          <table:table-cell table:style-name="表格14.A3" office:value-type="string">
            <text:p text:style-name="P5" loext:marker-style-name="T112"><text:span text:style-name="T120">—</text:span><text:span text:style-name="T112"/></text:p>
          </table:table-cell>
        </table:table-row>
        <table:table-row table:style-name="表格14.1">
          <table:table-cell table:style-name="表格14.A2" office:value-type="string">
            <text:p text:style-name="P5" loext:marker-style-name="T112"><text:span text:style-name="T113">防止 </text:span><text:span text:style-name="T120">Cycle </text:span><text:span text:style-name="T113">方式</text:span></text:p>
          </table:table-cell>
          <table:table-cell table:style-name="表格14.A2" office:value-type="string">
            <text:p text:style-name="P5" loext:marker-style-name="T112"><text:span text:style-name="T113">樹內→樹外規則，天然防止</text:span><text:span text:style-name="T112"/></text:p>
          </table:table-cell>
          <table:table-cell table:style-name="表格14.A2" office:value-type="string">
            <text:p text:style-name="P5" loext:marker-style-name="T112"><text:span text:style-name="T120">Union-Find </text:span><text:span text:style-name="T113">判斷</text:span></text:p>
          </table:table-cell>
          <table:table-cell table:style-name="表格14.A2" office:value-type="string">
            <text:p text:style-name="P5" loext:marker-style-name="T112"><text:span text:style-name="T120">Component </text:span><text:span text:style-name="T113">合併後自動排除</text:span></text:p>
          </table:table-cell>
          <table:table-cell table:style-name="表格14.A2" office:value-type="string">
            <text:p text:style-name="P5" loext:marker-style-name="T112"><text:span text:style-name="T120">—</text:span><text:span text:style-name="T112"/></text:p>
          </table:table-cell>
        </table:table-row>
      </table:table>
      <text:p text:style-name="P5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4" loext:marker-style-name="T25"><text:span text:style-name="T26">🧠 </text:span><text:span text:style-name="T27">一句話記憶口訣：</text:span></text:p>
            <text:p text:style-name="P35" loext:marker-style-name="T127"><text:span text:style-name="T128">Prim </text:span><text:span text:style-name="T129">從「點」長出來 <text:s text:c="2"/></text:span><text:span text:style-name="T128">Kruskal </text:span><text:span text:style-name="T129">從「邊」挑起來 <text:s text:c="2"/></text:span><text:span text:style-name="T128">Sollin </text:span><text:span text:style-name="T129">大家同時搶</text:span></text:p>
            <text:p text:style-name="P36" loext:marker-style-name="T18"><text:span text:style-name="T130">圖很密（邊多）→ </text:span><text:span text:style-name="T131">Prim</text:span><text:span text:style-name="T20"> <text:s/>│ <text:s/></text:span><text:span text:style-name="T130">圖很稀（邊少）→ </text:span><text:span text:style-name="T131">Kruskal </text:span><text:span text:style-name="T20"><text:s/>│ <text:s/></text:span><text:span text:style-name="T19">要</text:span><text:span text:style-name="T130">平行化 → </text:span><text:span text:style-name="T131">Sollin</text:span></text:p>
          </table:table-cell>
        </table:table-row>
      </table:table>
      <text:p text:style-name="P5"/>
      <text:h text:style-name="P9" text:outline-level="2" loext:marker-style-name="T23"><text:span text:style-name="T23">2-1 </text:span><text:span text:style-name="T24">什麼是稠密圖？什麼是稀疏圖？</text:span></text:h>
      <text:p text:style-name="P5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37" loext:marker-style-name="T99"><text:span text:style-name="T99">稠密圖（Dense Graph）： <text:s text:c="13"/>稀疏圖（Sparse Graph）：</text:span><text:span text:style-name="T99"/></text:p>
            <text:p text:style-name="P37" loext:marker-style-name="T99"><text:span text:style-name="T99">邊數 E 接近最大值 V(V-1)/2 <text:s text:c="10"/>邊數 E 遠小於 V(V-1)/2</text:span><text:span text:style-name="T99"/></text:p>
            <text:p text:style-name="P37" loext:marker-style-name="T99"><text:span text:style-name="T99">例：5個城市，幾乎每兩個都有路 <text:s text:c="7"/>例：100個城市，只有 110 條路</text:span><text:span text:style-name="T99"/></text:p>
            <text:p text:style-name="P37" loext:marker-style-name="T99"><text:span text:style-name="T99"><text:s text:c="2"/>A─B─C─D─E <text:s text:c="26"/>A <text:s text:c="9"/>B</text:span><text:span text:style-name="T99"/></text:p>
            <text:p text:style-name="P37" loext:marker-style-name="T99"><text:span text:style-name="T99"><text:s text:c="2"/>│╲│╱│╲│╱│ <text:s text:c="25"/>│ <text:s text:c="9"/>│</text:span><text:span text:style-name="T99"/></text:p>
            <text:p text:style-name="P37" loext:marker-style-name="T99"><text:span text:style-name="T99"><text:s text:c="2"/>└─┼─┼─┼─┘ <text:s text:c="2"/>邊非常多 <text:s text:c="13"/>C──D <text:s text:c="7"/>E</text:span><text:span text:style-name="T99"/></text:p>
            <text:p text:style-name="P37" loext:marker-style-name="T99"><text:span text:style-name="T99">100個節點最多 100×99/2 = 4950 條邊 <text:s text:c="2"/>100個節點可能只有 110 條邊</text:span><text:span text:style-name="T99"/></text:p>
            <text:p text:style-name="P37" loext:marker-style-name="T99"><text:span text:style-name="T99">→ 適合 Prim（不用排序） <text:s text:c="14"/>→ 適合 Kruskal（排序便宜）</text:span><text:span text:style-name="T99"/></text:p>
          </table:table-cell>
        </table:table-row>
      </table:table>
      <text:p text:style-name="P5"/>
      <text:p text:style-name="Standard"/>
      <text:h text:style-name="P8" text:outline-level="1" loext:marker-style-name="T21"><text:span text:style-name="T22">三、</text:span><text:span text:style-name="T21">Prim </text:span><text:span text:style-name="T22">演算法 ── 從節點出發，像樹一樣往外長</text:span></text:h>
      <text:p text:style-name="P5"/>
      <text:h text:style-name="P9" text:outline-level="2" loext:marker-style-name="T23"><text:span text:style-name="T23">3-1 </text:span><text:span text:style-name="T24">核心概念（超新手版解釋）</text:span></text:h>
      <text:p text:style-name="P5"/>
      <text:p text:style-name="P11" loext:marker-style-name="T30"><text:span text:style-name="T31">把 </text:span><text:span text:style-name="T32">Prim </text:span><text:span text:style-name="T31">想像成「蓋電纜網路」的工程：</text:span><text:span text:style-name="T79">先把一個城市接上電纜</text:span><text:span text:style-name="T31">（</text:span><text:span text:style-name="T132">T = </text:span><text:span text:style-name="T133">已連通的城市集合</text:span><text:span text:style-name="T31">），然後</text:span><text:span text:style-name="T134">每次往外找</text:span><text:span text:style-name="T37">「接一個新城市費用最低的電纜」</text:span><text:span text:style-name="T31">，一步步延伸，直到所有城市都有電纜為止。</text:span></text:p>
      <text:p text:style-name="P5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6" loext:marker-style-name="T25"><text:span text:style-name="T26">Prim </text:span><text:span text:style-name="T27">執行步驟（只有</text:span><text:span text:style-name="T26">4</text:span><text:span text:style-name="T27">步！）：</text:span></text:p>
            <text:p text:style-name="P7" loext:marker-style-name="T18"><text:span text:style-name="T20">① </text:span><text:span text:style-name="T93">從任意一個節點出發</text:span><text:span text:style-name="T19">，</text:span><text:span text:style-name="T135">加入「已選集合 </text:span><text:span text:style-name="T136">T</text:span><text:span text:style-name="T19">」。</text:span></text:p>
            <text:p text:style-name="P7" loext:marker-style-name="T18"><text:span text:style-name="T20">② </text:span><text:span text:style-name="T130">列出所有「</text:span><text:span text:style-name="T131">T </text:span><text:span text:style-name="T130">內 → </text:span><text:span text:style-name="T131">T </text:span><text:span text:style-name="T130">外」的邊</text:span><text:span text:style-name="T19">，這些叫</text:span><text:span text:style-name="T98">「候選邊」</text:span><text:span text:style-name="T19">。</text:span></text:p>
            <text:p text:style-name="P7" loext:marker-style-name="T18"><text:span text:style-name="T20">③ </text:span><text:span text:style-name="T137">從候選邊中挑出權重最小者</text:span><text:span text:style-name="T19">，</text:span><text:span text:style-name="T93">加入 </text:span><text:span text:style-name="T138">MST</text:span><text:span text:style-name="T19">，並</text:span><text:span text:style-name="T135">把新節點加入 </text:span><text:span text:style-name="T136">T</text:span><text:span text:style-name="T19">。</text:span></text:p>
            <text:p text:style-name="P7" loext:marker-style-name="T18"><text:span text:style-name="T20">④ </text:span><text:span text:style-name="T19">重複步驟②③，</text:span><text:span text:style-name="T98">直到 </text:span><text:span text:style-name="T139">T </text:span><text:span text:style-name="T98">包含全部 </text:span><text:span text:style-name="T139">V </text:span><text:span text:style-name="T98">個節點</text:span><text:span text:style-name="T19">（選了 </text:span><text:span text:style-name="T140">V-1 </text:span><text:span text:style-name="T141">條邊</text:span><text:span text:style-name="T19">）。</text:span></text:p>
            <text:p text:style-name="P38" loext:marker-style-name="T54"><text:span text:style-name="T55">關鍵：候選邊的規則</text:span><text:span text:style-name="T142">「一端在 </text:span><text:span text:style-name="T143">T </text:span><text:span text:style-name="T142">內、另一端在 </text:span><text:span text:style-name="T143">T </text:span><text:span text:style-name="T142">外」天然保證不成環！</text:span></text:p>
          </table:table-cell>
        </table:table-row>
      </table:table>
      <text:p text:style-name="P5"/>
      <text:h text:style-name="P9" text:outline-level="2" loext:marker-style-name="T23"><text:span text:style-name="T23">3-2 </text:span><text:span text:style-name="T24">完整圖解範例（</text:span><text:span text:style-name="T23">4</text:span><text:span text:style-name="T24">個節點 </text:span><text:span text:style-name="T23">A, B, C, D</text:span><text:span text:style-name="T24">）</text:span></text:h>
      <text:p text:style-name="P5"/>
      <text:p text:style-name="P11" loext:marker-style-name="T30"><text:span text:style-name="T31">範例圖：</text:span><text:span text:style-name="T32">AB=1, AC=4, BC=2, BD=5, CD=3</text:span></text:p>
      <text:p text:style-name="P39" loext:marker-style-name="T30"><draw:frame draw:style-name="fr1" draw:name="影像1" text:anchor-type="char" svg:x="4.872cm" svg:y="0.042cm" svg:width="5.943cm" svg:height="5.445cm" draw:z-index="5"><draw:image xlink:href="Pictures/1000000100000224000001F643D3A16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14" loext:marker-style-name="T81"><text:span text:style-name="T83">Step 1</text:span><text:span text:style-name="T82">：從 </text:span><text:span text:style-name="T83">A </text:span><text:span text:style-name="T82">開始，</text:span><text:span text:style-name="T83">T = {A}</text:span></text:p>
            <text:p text:style-name="P16" loext:marker-style-name="T144"><text:span text:style-name="T145">T</text:span><text:span text:style-name="T146">（已連通集合）</text:span><text:span text:style-name="T145">= {A}</text:span></text:p>
            <text:p text:style-name="P16" loext:marker-style-name="T144"><text:span text:style-name="T146">候選邊（</text:span><text:span text:style-name="T145">A </text:span><text:span text:style-name="T146">往外連的邊）：</text:span></text:p>
            <text:p text:style-name="P32" loext:marker-style-name="T147"><text:span text:style-name="T147"><text:s text:c="2"/>A─B = 1 <text:s text:c="2"/>← 最小！選它！</text:span><text:span text:style-name="T147"/></text:p>
            <text:p text:style-name="P34" loext:marker-style-name="T43"><text:span text:style-name="T43"><text:s text:c="2"/>A─C = 4</text:span><text:span text:style-name="T43"/></text:p>
            <text:p text:style-name="P16" loext:marker-style-name="T144"><text:span text:style-name="T146">動作：加入邊 </text:span><text:span text:style-name="T145">A─B=1</text:span><text:span text:style-name="T146">，</text:span><text:span text:style-name="T148">節點 </text:span><text:span text:style-name="T149">B </text:span><text:span text:style-name="T148">加入 </text:span><text:span text:style-name="T149">T</text:span></text:p>
            <text:p text:style-name="P40" loext:marker-style-name="T43"><text:span text:style-name="T43">目前 MST： <text:s/>A │ 1 │ B</text:span><text:span text:style-name="T43"/></text:p>
          </table:table-cell>
        </table:table-row>
      </table:table>
      <text:p text:style-name="P5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4" loext:marker-style-name="T81"><text:span text:style-name="T83">Step 2</text:span><text:span text:style-name="T82">：</text:span><text:span text:style-name="T136">T = {A, B}</text:span><text:span text:style-name="T82">，繼續往外長</text:span></text:p>
            <text:p text:style-name="P16" loext:marker-style-name="T144"><text:span text:style-name="T145">T</text:span><text:span text:style-name="T146">（已連通集合）</text:span><text:span text:style-name="T145">= {A, B}</text:span></text:p>
            <text:p text:style-name="P16" loext:marker-style-name="T144"><text:span text:style-name="T146">候選邊（</text:span><text:span text:style-name="T145">T </text:span><text:span text:style-name="T146">往外連的邊）：</text:span></text:p>
            <text:p text:style-name="P32" loext:marker-style-name="T43"><text:span text:style-name="T43"><text:s text:c="2"/>A─C = 4 <text:s/>（A在T，C在T外）</text:span><text:span text:style-name="T43"/></text:p>
            <text:p text:style-name="P32" loext:marker-style-name="T147"><text:span text:style-name="T147"><text:s text:c="2"/>B─C = 2 <text:s/>（B在T，C在T外）← 最小！</text:span><text:span text:style-name="T147"/></text:p>
            <text:p text:style-name="P32" loext:marker-style-name="T43"><text:span text:style-name="T43"><text:s text:c="2"/>B─D = 5 <text:s/>（B在T，D在T外）</text:span><text:span text:style-name="T43"/></text:p>
            <text:p text:style-name="P34" loext:marker-style-name="T150"><text:span text:style-name="T150"><text:s text:c="2"/>❌ A─B 兩端都在 T，不是候選邊</text:span><text:span text:style-name="T150"/></text:p>
            <text:p text:style-name="P16" loext:marker-style-name="T144"><text:span text:style-name="T146">動作：加入邊 </text:span><text:span text:style-name="T145">B─C=2</text:span><text:span text:style-name="T146">，</text:span><text:span text:style-name="T148">節點 </text:span><text:span text:style-name="T149">C </text:span><text:span text:style-name="T148">加入 </text:span><text:span text:style-name="T149">T</text:span></text:p>
            <text:p text:style-name="P40" loext:marker-style-name="T43"><text:span text:style-name="T43">目前 MST： <text:s/>A │ 1 │ B ──2── C</text:span><text:span text:style-name="T43"/></text:p>
          </table:table-cell>
        </table:table-row>
      </table:table>
      <text:p text:style-name="P5"/>
      <table:table table:name="表格20" table:style-name="表格20">
        <table:table-column table:style-name="表格20.A"/>
        <text:soft-page-break/>
        <table:table-row table:style-name="表格20.1">
          <table:table-cell table:style-name="表格20.A1" office:value-type="string">
            <text:p text:style-name="P14" loext:marker-style-name="T81"><text:span text:style-name="T83">Step 3</text:span><text:span text:style-name="T82">：</text:span><text:span text:style-name="T136">T = {A, B, C}</text:span><text:span text:style-name="T82">，繼續往外長</text:span></text:p>
            <text:p text:style-name="P16" loext:marker-style-name="T144"><text:span text:style-name="T145">T</text:span><text:span text:style-name="T146">（已連通集合）</text:span><text:span text:style-name="T145">= {A, B, C}</text:span></text:p>
            <text:p text:style-name="P16" loext:marker-style-name="T144"><text:span text:style-name="T146">候選邊（</text:span><text:span text:style-name="T145">T </text:span><text:span text:style-name="T146">往外連的邊）：</text:span></text:p>
            <text:p text:style-name="P32" loext:marker-style-name="T150"><text:span text:style-name="T150"><text:s text:c="2"/>A─C = 4 <text:s/>兩端都在T！不是候選邊</text:span><text:span text:style-name="T150"/></text:p>
            <text:p text:style-name="P32" loext:marker-style-name="T150"><text:span text:style-name="T150"><text:s text:c="2"/>B─C = 2 <text:s/>兩端都在T！不是候選邊</text:span><text:span text:style-name="T150"/></text:p>
            <text:p text:style-name="P32" loext:marker-style-name="T43"><text:span text:style-name="T43"><text:s text:c="2"/>B─D = 5 <text:s/>（B在T，D在T外）</text:span><text:span text:style-name="T43"/></text:p>
            <text:p text:style-name="P34" loext:marker-style-name="T147"><text:span text:style-name="T147"><text:s text:c="2"/>C─D = 3 <text:s/>（C在T，D在T外）← 最小！</text:span><text:span text:style-name="T147"/></text:p>
            <text:p text:style-name="P16" loext:marker-style-name="T144"><text:span text:style-name="T146">動作：加入邊 </text:span><text:span text:style-name="T145">C─D=3</text:span><text:span text:style-name="T146">，</text:span><text:span text:style-name="T148">節點 </text:span><text:span text:style-name="T149">D </text:span><text:span text:style-name="T148">加入 </text:span><text:span text:style-name="T149">T</text:span></text:p>
            <text:p text:style-name="P40" loext:marker-style-name="T43"><text:span text:style-name="T43">目前 MST： <text:s/>A │ 1 │ B ──2── C │ 3 │ D</text:span><text:span text:style-name="T43"/></text:p>
          </table:table-cell>
        </table:table-row>
      </table:table>
      <text:p text:style-name="P5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4" loext:marker-style-name="T47"><text:span text:style-name="T48">✅ </text:span><text:span text:style-name="T49">完成！</text:span><text:span text:style-name="T136">T = {A, B, C, D}</text:span><text:span text:style-name="T49">，所有節點已連通</text:span></text:p>
            <text:p text:style-name="P16" loext:marker-style-name="T151"><text:span text:style-name="T152">MST </text:span><text:span text:style-name="T153">邊集合：</text:span><text:span text:style-name="T152">A─B=1, B─C=2, C─D=3</text:span></text:p>
            <text:p text:style-name="P16" loext:marker-style-name="T66"><text:span text:style-name="T67">總權重：</text:span><text:span text:style-name="T68">1 + 2 + 3 = 6</text:span></text:p>
            <text:p text:style-name="P40" loext:marker-style-name="T18"><text:span text:style-name="T19">邊數驗證：</text:span><text:span text:style-name="T20">V-1 = 4-1 = 3 </text:span><text:span text:style-name="T19">條 <text:s/>✅</text:span></text:p>
          </table:table-cell>
        </table:table-row>
      </table:table>
      <text:p text:style-name="P5"/>
      <text:h text:style-name="P9" text:outline-level="2" loext:marker-style-name="T23"><text:span text:style-name="T23">3-3 </text:span><text:span text:style-name="T24">為什麼 </text:span><text:span text:style-name="T23">Prim </text:span><text:span text:style-name="T24">天然不產生 </text:span><text:span text:style-name="T23">Cycle</text:span><text:span text:style-name="T24">？</text:span></text:h>
      <text:p text:style-name="P5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4" loext:marker-style-name="T81"><text:span text:style-name="T82">【規則】：</text:span><text:span text:style-name="T98">候選邊必須「一端在</text:span><text:span text:style-name="T139">T</text:span><text:span text:style-name="T98">、一端不在</text:span><text:span text:style-name="T139">T</text:span><text:span text:style-name="T98">」</text:span></text:p>
            <text:p text:style-name="P41" loext:marker-style-name="T144"><text:span text:style-name="T145">T = {A, B, C}</text:span><text:span text:style-name="T146">：</text:span></text:p>
            <text:p text:style-name="P32" loext:marker-style-name="T99"><text:span text:style-name="T99">✅ 合法候選邊： <text:s text:c="13"/>❌ 自動排除（兩端都在T）：</text:span><text:span text:style-name="T99"/></text:p>
            <text:p text:style-name="P32" loext:marker-style-name="T99"><text:span text:style-name="T99"><text:s text:c="2"/>C → D <text:s/>一端在T外，OK <text:s text:c="7"/>A ─ B <text:s/>兩端都在T，若加 → 成環！</text:span><text:span text:style-name="T99"/></text:p>
            <text:p text:style-name="P34" loext:marker-style-name="T99"><text:span text:style-name="T99"><text:s text:c="2"/>B → D <text:s/>一端在T外，OK <text:s text:c="7"/>B ─ C <text:s/>兩端都在T，若加 → 成環！</text:span><text:span text:style-name="T99"/></text:p>
            <text:p text:style-name="P40" loext:marker-style-name="T100"><text:span text:style-name="T102">結論：</text:span><text:span text:style-name="T154">Prim </text:span><text:span text:style-name="T155">靠「</text:span><text:span text:style-name="T154">T</text:span><text:span text:style-name="T155">內→</text:span><text:span text:style-name="T154">T</text:span><text:span text:style-name="T155">外」規則</text:span><text:span text:style-name="T102">，完全不需要 </text:span><text:span text:style-name="T101">Union-Find</text:span><text:span text:style-name="T102">，也不用額外檢查環，</text:span><text:span text:style-name="T155">天然保證 </text:span><text:span text:style-name="T154">MST </text:span><text:span text:style-name="T155">合法！</text:span></text:p>
          </table:table-cell>
        </table:table-row>
      </table:table>
      <text:p text:style-name="P5"/>
      <text:h text:style-name="P9" text:outline-level="2" loext:marker-style-name="T23"><text:span text:style-name="T23">3-4 Prim </text:span><text:span text:style-name="T24">演算法（虛擬碼 </text:span><text:span text:style-name="T23">Pseudocode</text:span><text:span text:style-name="T24">）</text:span></text:h>
      <text:p text:style-name="P5"/>
      <text:p text:style-name="P11" loext:marker-style-name="T30"><text:span text:style-name="T32">Prim </text:span><text:span text:style-name="T31">的精神在 </text:span><text:span text:style-name="T32">3-1 </text:span><text:span text:style-name="T31">已經講過：先把一個點放進「已連通集合 </text:span><text:span text:style-name="T32">T</text:span><text:span text:style-name="T31">」，接著每次從「一端在 </text:span><text:span text:style-name="T32">T </text:span><text:span text:style-name="T31">內、一端在 </text:span><text:span text:style-name="T32">T </text:span><text:span text:style-name="T31">外」的候選邊裡，挑最便宜的那一條，把新的點拉進 </text:span><text:span text:style-name="T32">T</text:span><text:span text:style-name="T31">。下面把它寫成虛擬碼。</text:span></text:p>
      <text:p text:style-name="P11" loext:marker-style-name="T30"><text:span text:style-name="T31">實作上會用一個 </text:span><text:span text:style-name="T32">Min-Heap</text:span><text:span text:style-name="T31">（最小堆積）保管所有候選邊，這樣每一次都能很快取出最便宜的那一條。</text:span></text:p>
      <text:p text:style-name="P5"/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42" loext:marker-style-name="T156"><text:span text:style-name="T156">// Prim </text:span><text:span text:style-name="T157">主演算法（用 </text:span><text:span text:style-name="T156">Min-Heap </text:span><text:span text:style-name="T157">保管候選邊）</text:span></text:p>
            <text:p text:style-name="P42" loext:marker-style-name="T158"><text:span text:style-name="T158">PRIM(V, E, start):</text:span><text:span text:style-name="T158"/></text:p>
            <text:p text:style-name="P42" loext:marker-style-name="T158"><text:span text:style-name="T158"><text:s text:c="4"/>for each </text:span><text:span text:style-name="T159">節點 </text:span><text:span text:style-name="T158">v in V:</text:span></text:p>
            <text:p text:style-name="P42" loext:marker-style-name="T158"><text:span text:style-name="T158"><text:s text:c="8"/>inTree[v] ← false <text:s text:c="7"/>// </text:span><text:span text:style-name="T159">一開始所有點都還沒進 </text:span><text:span text:style-name="T158">T</text:span></text:p>
            <text:p text:style-name="P42" loext:marker-style-name="T158"><text:span text:style-name="T158"><text:s text:c="4"/>MST ← { }; <text:s/>total ← 0</text:span><text:span text:style-name="T158"/></text:p>
            <text:p text:style-name="P42" loext:marker-style-name="T158"><text:span text:style-name="T158"><text:s text:c="4"/>Min-Heap pq ← </text:span><text:span text:style-name="T159">空 <text:s text:c="12"/></text:span><text:span text:style-name="T158">// </text:span><text:span text:style-name="T159">候選邊 </text:span><text:span text:style-name="T158">(</text:span><text:span text:style-name="T159">權重</text:span><text:span text:style-name="T158">, </text:span><text:span text:style-name="T159">來源</text:span><text:span text:style-name="T158">, </text:span><text:span text:style-name="T159">目標</text:span><text:span text:style-name="T158">)</text:span></text:p>
            <text:p text:style-name="P43" loext:marker-style-name="T158"/>
            <text:p text:style-name="P42" loext:marker-style-name="T158"><text:span text:style-name="T158"><text:s text:c="4"/>inTree[start] ← true <text:s text:c="9"/>// </text:span><text:span text:style-name="T159">把起點放進 </text:span><text:span text:style-name="T158">T</text:span></text:p>
            <text:p text:style-name="P42" loext:marker-style-name="T158"><text:span text:style-name="T158"><text:s text:c="4"/></text:span><text:span text:style-name="T159">把 </text:span><text:span text:style-name="T158">start </text:span><text:span text:style-name="T159">的所有鄰邊 </text:span><text:span text:style-name="T158">(w, start, v) </text:span><text:span text:style-name="T159">放進 </text:span><text:span text:style-name="T158">pq</text:span></text:p>
            <text:p text:style-name="P43" loext:marker-style-name="T158"/>
            <text:p text:style-name="P42" loext:marker-style-name="T158"><text:span text:style-name="T158"><text:s text:c="4"/>while pq </text:span><text:span text:style-name="T159">不為空 且 </text:span><text:span text:style-name="T158">|MST| &lt; V − 1:</text:span></text:p>
            <text:p text:style-name="P42" loext:marker-style-name="T158"><text:span text:style-name="T158"><text:s text:c="8"/>(w, u, v) ← Extract-Min(pq) <text:s text:c="2"/>// </text:span><text:span text:style-name="T159">取出最便宜的候選邊</text:span></text:p>
            <text:p text:style-name="P42" loext:marker-style-name="T158"><text:span text:style-name="T158"><text:s text:c="8"/>if inTree[v]: continue <text:s text:c="7"/>// </text:span><text:span text:style-name="T159">兩端都在 </text:span><text:span text:style-name="T158">T</text:span><text:span text:style-name="T159">，丟掉</text:span></text:p>
            <text:p text:style-name="P42" loext:marker-style-name="T158"><text:span text:style-name="T158"><text:s text:c="8"/>inTree[v] ← true <text:s text:c="13"/>// </text:span><text:span text:style-name="T159">把新點 </text:span><text:span text:style-name="T158">v </text:span><text:span text:style-name="T159">拉進 </text:span><text:span text:style-name="T158">T</text:span></text:p>
            <text:p text:style-name="P42" loext:marker-style-name="T158"><text:span text:style-name="T158"><text:s text:c="8"/></text:span><text:span text:style-name="T159">將邊 </text:span><text:span text:style-name="T158">(u, v) </text:span><text:span text:style-name="T159">加入 </text:span><text:span text:style-name="T158">MST</text:span></text:p>
            <text:p text:style-name="P42" loext:marker-style-name="T158"><text:span text:style-name="T158"><text:s text:c="8"/>total ← total + w</text:span><text:span text:style-name="T158"/></text:p>
            <text:p text:style-name="P42" loext:marker-style-name="T158"><text:span text:style-name="T158"><text:s text:c="8"/>for each </text:span><text:span text:style-name="T159">鄰邊 </text:span><text:span text:style-name="T158">(v, x, w2): <text:s text:c="5"/>// v </text:span><text:span text:style-name="T159">新開的候選邊</text:span></text:p>
            <text:p text:style-name="P42" loext:marker-style-name="T158"><text:span text:style-name="T158"><text:s text:c="12"/>if not inTree[x]:</text:span><text:span text:style-name="T158"/></text:p>
            <text:p text:style-name="P42" loext:marker-style-name="T158"><text:span text:style-name="T158"><text:s text:c="16"/></text:span><text:span text:style-name="T159">把 </text:span><text:span text:style-name="T158">(w2, v, x) </text:span><text:span text:style-name="T159">放進 </text:span><text:span text:style-name="T158">pq</text:span></text:p>
            <text:p text:style-name="P43" loext:marker-style-name="T158"><text:soft-page-break/></text:p>
            <text:p text:style-name="P42" loext:marker-style-name="T158"><text:span text:style-name="T158"><text:s text:c="4"/>return MST, total</text:span><text:span text:style-name="T158"/></text:p>
          </table:table-cell>
        </table:table-row>
      </table:table>
      <text:p text:style-name="P5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6" loext:marker-style-name="T25"><text:span text:style-name="T27">對應回 </text:span><text:span text:style-name="T26">3-1 </text:span><text:span text:style-name="T27">的四步，一一對上：</text:span></text:p>
            <text:p text:style-name="P7" loext:marker-style-name="T18"><text:span text:style-name="T20">• inTree[ ] </text:span><text:span text:style-name="T19">就是「已選集合 </text:span><text:span text:style-name="T20">T</text:span><text:span text:style-name="T19">」。</text:span></text:p>
            <text:p text:style-name="P7" loext:marker-style-name="T18"><text:span text:style-name="T20">• pq</text:span><text:span text:style-name="T19">（</text:span><text:span text:style-name="T20">Min-Heap</text:span><text:span text:style-name="T19">）裡放的，就是「一端在 </text:span><text:span text:style-name="T20">T</text:span><text:span text:style-name="T19">、一端在 </text:span><text:span text:style-name="T20">T </text:span><text:span text:style-name="T19">外」的候選邊。</text:span></text:p>
            <text:p text:style-name="P7" loext:marker-style-name="T18"><text:span text:style-name="T20">• Extract-Min </text:span><text:span text:style-name="T19">就是「從候選邊挑出最小的那條」。</text:span></text:p>
            <text:p text:style-name="P7" loext:marker-style-name="T18"><text:span text:style-name="T20">• if inTree[v] continue </text:span><text:span text:style-name="T19">把「兩端都在 </text:span><text:span text:style-name="T20">T</text:span><text:span text:style-name="T19">」的邊自動丟掉 ── 所以 </text:span><text:span text:style-name="T20">Prim </text:span><text:span text:style-name="T19">天然不會成環。</text:span></text:p>
          </table:table-cell>
        </table:table-row>
      </table:table>
      <text:p text:style-name="P5"/>
      <text:h text:style-name="P9" text:outline-level="2" loext:marker-style-name="T23"><text:span text:style-name="T23">3-5 Prim </text:span><text:span text:style-name="T24">時間複雜度</text:span></text:h>
      <text:p text:style-name="P5"/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/>
        <table:table-row table:style-name="表格25.1">
          <table:table-cell table:style-name="表格25.A1" office:value-type="string">
            <text:p text:style-name="P5" loext:marker-style-name="T160"><text:span text:style-name="T161">版本</text:span><text:span text:style-name="T160"/></text:p>
          </table:table-cell>
          <table:table-cell table:style-name="表格25.A1" office:value-type="string">
            <text:p text:style-name="P5" loext:marker-style-name="T160"><text:span text:style-name="T161">資料結構</text:span><text:span text:style-name="T160"/></text:p>
          </table:table-cell>
          <table:table-cell table:style-name="表格25.A1" office:value-type="string">
            <text:p text:style-name="P5" loext:marker-style-name="T160"><text:span text:style-name="T161">時間複雜度</text:span><text:span text:style-name="T160"/></text:p>
          </table:table-cell>
          <table:table-cell table:style-name="表格25.A1" office:value-type="string">
            <text:p text:style-name="P5" loext:marker-style-name="T160"><text:span text:style-name="T161">什麼時候用？</text:span><text:span text:style-name="T160"/></text:p>
          </table:table-cell>
        </table:table-row>
        <table:table-row table:style-name="表格25.1">
          <table:table-cell table:style-name="表格25.A2" office:value-type="string">
            <text:p text:style-name="P5" loext:marker-style-name="T144"><text:span text:style-name="T146">基本版</text:span><text:span text:style-name="T144"/></text:p>
          </table:table-cell>
          <table:table-cell table:style-name="表格25.A2" office:value-type="string">
            <text:p text:style-name="P5" loext:marker-style-name="T144"><text:span text:style-name="T146">鄰接矩陣</text:span><text:span text:style-name="T144"/></text:p>
          </table:table-cell>
          <table:table-cell table:style-name="表格25.A2" office:value-type="string">
            <text:p text:style-name="P5" loext:marker-style-name="T162"><text:span text:style-name="T163">O(V²)</text:span><text:span text:style-name="T162"/></text:p>
          </table:table-cell>
          <table:table-cell table:style-name="表格25.A2" office:value-type="string">
            <text:p text:style-name="P5" loext:marker-style-name="T144"><text:span text:style-name="T146">稠密圖（邊數接近 </text:span><text:span text:style-name="T145">V²</text:span><text:span text:style-name="T146">）時，這個反而最省</text:span></text:p>
          </table:table-cell>
        </table:table-row>
        <table:table-row table:style-name="表格25.1">
          <table:table-cell table:style-name="表格25.A3" office:value-type="string">
            <text:p text:style-name="P5" loext:marker-style-name="T144"><text:span text:style-name="T146">最佳化版</text:span><text:span text:style-name="T144"/></text:p>
          </table:table-cell>
          <table:table-cell table:style-name="表格25.A3" office:value-type="string">
            <text:p text:style-name="P5" loext:marker-style-name="T144"><text:span text:style-name="T145">Min-Heap</text:span><text:span text:style-name="T146">（優先佇列）</text:span></text:p>
          </table:table-cell>
          <table:table-cell table:style-name="表格25.A3" office:value-type="string">
            <text:p text:style-name="P5" loext:marker-style-name="T164"><text:span text:style-name="T165">O(E log V)</text:span><text:span text:style-name="T164"/></text:p>
          </table:table-cell>
          <table:table-cell table:style-name="表格25.A3" office:value-type="string">
            <text:p text:style-name="P5" loext:marker-style-name="T144"><text:span text:style-name="T146">一般圖，</text:span><text:span text:style-name="T145">E </text:span><text:span text:style-name="T146">不太大時使用</text:span></text:p>
          </table:table-cell>
        </table:table-row>
      </table:table>
      <text:p text:style-name="P5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6" loext:marker-style-name="T25"><text:span text:style-name="T27">【版本一】鄰接矩陣版 → </text:span><text:span text:style-name="T26">O(V²)</text:span></text:p>
            <text:p text:style-name="P6" loext:marker-style-name="T25"><text:span text:style-name="T27">【版本二】</text:span><text:span text:style-name="T26">Min-Heap </text:span><text:span text:style-name="T27">版 → </text:span><text:span text:style-name="T26">O(E log V)</text:span></text:p>
            <text:p text:style-name="P7" loext:marker-style-name="T18"><text:span text:style-name="T19">稠密圖（</text:span><text:span text:style-name="T20">E ≈ V²</text:span><text:span text:style-name="T19">）用版本一更省；稀疏圖用版本二更快。</text:span></text:p>
          </table:table-cell>
        </table:table-row>
      </table:table>
      <text:p text:style-name="P5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6" loext:marker-style-name="T15"><text:span text:style-name="T17">版本一：鄰接矩陣版 → </text:span><text:span text:style-name="T16">O(V²)</text:span></text:p>
            <text:p text:style-name="P19" loext:marker-style-name="T18"/>
            <text:p text:style-name="P7" loext:marker-style-name="T18"><text:span text:style-name="T20">Prim </text:span><text:span text:style-name="T19">的外層迴圈跑 </text:span><text:span text:style-name="T20">V </text:span><text:span text:style-name="T19">次（把 </text:span><text:span text:style-name="T20">V </text:span><text:span text:style-name="T19">個節點一一加入集合 </text:span><text:span text:style-name="T20">T</text:span><text:span text:style-name="T19">）。</text:span></text:p>
            <text:p text:style-name="P7" loext:marker-style-name="T18"><text:span text:style-name="T19">每一次迭代做兩件事：</text:span><text:span text:style-name="T18"/></text:p>
            <text:p text:style-name="P7" loext:marker-style-name="T18"><text:span text:style-name="T20">① </text:span><text:span text:style-name="T166">從所有</text:span><text:span text:style-name="T96">「</text:span><text:span text:style-name="T97">T </text:span><text:span text:style-name="T96">外節點」找距離 </text:span><text:span text:style-name="T97">T </text:span><text:span text:style-name="T96">最近的節點 </text:span><text:span text:style-name="T19">→ 掃描整行矩陣 </text:span><text:span text:style-name="T139">O(V)</text:span></text:p>
            <text:p text:style-name="P7" loext:marker-style-name="T18"><text:span text:style-name="T20">② </text:span><text:span text:style-name="T167">把新節點加入 </text:span><text:span text:style-name="T168">T</text:span><text:span text:style-name="T19">，</text:span><text:span text:style-name="T169">更新其他節點</text:span><text:span text:style-name="T170">到 </text:span><text:span text:style-name="T171">T </text:span><text:span text:style-name="T169">的最短距離</text:span><text:span text:style-name="T19"> → 再掃一整行 </text:span><text:span text:style-name="T139">O(V)</text:span></text:p>
            <text:p text:style-name="P19" loext:marker-style-name="T18"/>
            <text:p text:style-name="P15" loext:marker-style-name="T47"><text:span text:style-name="T48">→ </text:span><text:span text:style-name="T172">外層 </text:span><text:span text:style-name="T173">V </text:span><text:span text:style-name="T172">次 </text:span><text:span text:style-name="T173">× </text:span><text:span text:style-name="T172">每次 </text:span><text:span text:style-name="T173">O(V)</text:span><text:span text:style-name="T48"> = </text:span><text:span text:style-name="T174">O(V × V)</text:span><text:span text:style-name="T48"> = O(V²)</text:span></text:p>
            <text:p text:style-name="P19" loext:marker-style-name="T18"/>
            <text:p text:style-name="P14" loext:marker-style-name="T54"><text:span text:style-name="T55">為什麼每次掃描是 </text:span><text:span text:style-name="T56">O(V)</text:span><text:span text:style-name="T55">？</text:span></text:p>
            <text:p text:style-name="P7" loext:marker-style-name="T18"><text:span text:style-name="T19">鄰接矩陣是 </text:span><text:span text:style-name="T20">V×V </text:span><text:span text:style-name="T19">的表格。</text:span><text:span text:style-name="T98">要找「最近節點」或「更新距離」，</text:span></text:p>
            <text:p text:style-name="P7" loext:marker-style-name="T18"><text:span text:style-name="T98">都必須逐格讀整行</text:span><text:span text:style-name="T19">，共 </text:span><text:span text:style-name="T20">V </text:span><text:span text:style-name="T19">格 → 每次 </text:span><text:span text:style-name="T20">O(V)</text:span><text:span text:style-name="T19">。</text:span></text:p>
            <text:p text:style-name="P19" loext:marker-style-name="T18"/>
            <text:p text:style-name="P14" loext:marker-style-name="T54"><text:span text:style-name="T55">什麼時候 </text:span><text:span text:style-name="T175">O(V²) </text:span><text:span text:style-name="T176">反而比較好？</text:span><text:span text:style-name="T177">稠密圖（</text:span><text:span text:style-name="T178">E ≈ V²</text:span><text:span text:style-name="T177">）</text:span><text:span text:style-name="T93">時；</text:span></text:p>
            <text:p text:style-name="P7" loext:marker-style-name="T18"><text:span text:style-name="T20">O(E log V) ≈ O(V² log V)</text:span><text:span text:style-name="T19">，</text:span><text:span text:style-name="T55">比 </text:span><text:span text:style-name="T56">O(V²) </text:span><text:span text:style-name="T55">還慢！→ </text:span><text:span text:style-name="T176">稠密圖請用矩陣版</text:span><text:span text:style-name="T55">。</text:span></text:p>
          </table:table-cell>
        </table:table-row>
      </table:table>
      <text:p text:style-name="P5"/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row table:style-name="表格28.1">
          <table:table-cell table:style-name="表格28.A1" office:value-type="string">
            <text:p text:style-name="P5" loext:marker-style-name="T160"><text:span text:style-name="T161">操作</text:span><text:span text:style-name="T160"/></text:p>
          </table:table-cell>
          <table:table-cell table:style-name="表格28.A1" office:value-type="string">
            <text:p text:style-name="P5" loext:marker-style-name="T160"><text:span text:style-name="T161">執行次數</text:span><text:span text:style-name="T160"/></text:p>
          </table:table-cell>
          <table:table-cell table:style-name="表格28.A1" office:value-type="string">
            <text:p text:style-name="P5" loext:marker-style-name="T160"><text:span text:style-name="T161">每次花費</text:span><text:span text:style-name="T160"/></text:p>
          </table:table-cell>
          <table:table-cell table:style-name="表格28.A1" office:value-type="string">
            <text:p text:style-name="P5" loext:marker-style-name="T160"><text:span text:style-name="T161">小計</text:span><text:span text:style-name="T160"/></text:p>
          </table:table-cell>
        </table:table-row>
        <table:table-row table:style-name="表格28.1">
          <table:table-cell table:style-name="表格28.A2" office:value-type="string">
            <text:p text:style-name="P7" loext:marker-style-name="T18"><text:span text:style-name="T19">找最小距離節點</text:span><text:span text:style-name="T18"/></text:p>
          </table:table-cell>
          <table:table-cell table:style-name="表格28.A2" office:value-type="string">
            <text:p text:style-name="P7" loext:marker-style-name="T18"><text:span text:style-name="T20">V </text:span><text:span text:style-name="T19">次（</text:span><text:span text:style-name="T179">每個節點加入一次</text:span><text:span text:style-name="T19">）</text:span></text:p>
          </table:table-cell>
          <table:table-cell table:style-name="表格28.A2" office:value-type="string">
            <text:p text:style-name="P7" loext:marker-style-name="T18"><text:span text:style-name="T20">O(V)</text:span><text:span text:style-name="T19">（</text:span><text:span text:style-name="T180">掃全部 </text:span><text:span text:style-name="T181">T </text:span><text:span text:style-name="T180">外節點</text:span><text:span text:style-name="T19">）</text:span></text:p>
          </table:table-cell>
          <table:table-cell table:style-name="表格28.A2" office:value-type="string">
            <text:p text:style-name="P7" loext:marker-style-name="T18"><text:span text:style-name="T20">V × V = O(V²)</text:span><text:span text:style-name="T18"/></text:p>
          </table:table-cell>
        </table:table-row>
        <table:table-row table:style-name="表格28.1">
          <table:table-cell table:style-name="表格28.A3" office:value-type="string">
            <text:p text:style-name="P7" loext:marker-style-name="T18"><text:span text:style-name="T19">更新鄰居距離</text:span><text:span text:style-name="T18"/></text:p>
          </table:table-cell>
          <table:table-cell table:style-name="表格28.A3" office:value-type="string">
            <text:p text:style-name="P7" loext:marker-style-name="T18"><text:span text:style-name="T20">V </text:span><text:span text:style-name="T19">次</text:span></text:p>
          </table:table-cell>
          <table:table-cell table:style-name="表格28.A3" office:value-type="string">
            <text:p text:style-name="P7" loext:marker-style-name="T18"><text:span text:style-name="T20">O(V)</text:span><text:span text:style-name="T19">（</text:span><text:span text:style-name="T182">掃整行矩陣</text:span><text:span text:style-name="T19">）</text:span></text:p>
          </table:table-cell>
          <table:table-cell table:style-name="表格28.A3" office:value-type="string">
            <text:p text:style-name="P7" loext:marker-style-name="T18"><text:span text:style-name="T20">V × V = O(V²)</text:span><text:span text:style-name="T18"/></text:p>
          </table:table-cell>
        </table:table-row>
        <text:soft-page-break/>
        <table:table-row table:style-name="表格28.1">
          <table:table-cell table:style-name="表格28.A4" office:value-type="string">
            <text:p text:style-name="P14" loext:marker-style-name="T69"><text:span text:style-name="T71">總計</text:span><text:span text:style-name="T69"/></text:p>
          </table:table-cell>
          <table:table-cell table:style-name="表格28.A4" office:value-type="string">
            <text:p text:style-name="P14" loext:marker-style-name="T69"><text:span text:style-name="T70">—</text:span><text:span text:style-name="T69"/></text:p>
          </table:table-cell>
          <table:table-cell table:style-name="表格28.A4" office:value-type="string">
            <text:p text:style-name="P14" loext:marker-style-name="T69"><text:span text:style-name="T70">—</text:span><text:span text:style-name="T69"/></text:p>
          </table:table-cell>
          <table:table-cell table:style-name="表格28.A4" office:value-type="string">
            <text:p text:style-name="P14" loext:marker-style-name="T69"><text:span text:style-name="T70">O(V²)</text:span><text:span text:style-name="T69"/></text:p>
          </table:table-cell>
        </table:table-row>
      </table:table>
      <text:p text:style-name="P5"/>
      <text:p text:style-name="P7" loext:marker-style-name="T18"><draw:frame draw:style-name="fr2" draw:name="影像2" text:anchor-type="as-char" svg:width="16cm" svg:height="12.471cm" draw:z-index="0"><draw:image xlink:href="Pictures/1000000000000550000003C07CAFE178.png" xlink:type="simple" xlink:show="embed" xlink:actuate="onLoad" draw:mime-type="image/png"/></draw:frame></text:p>
      <text:p text:style-name="P19" loext:marker-style-name="T18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6" loext:marker-style-name="T15"><text:span text:style-name="T17">版本二：</text:span><text:span text:style-name="T183">Min-Heap</text:span><text:span text:style-name="T184">（最小堆積）版 → </text:span><text:span text:style-name="T185">O(E log V)</text:span></text:p>
            <text:p text:style-name="P19" loext:marker-style-name="T18"/>
            <text:p text:style-name="P6" loext:marker-style-name="T81"><text:span text:style-name="T82">先搞懂 </text:span><text:span text:style-name="T83">Heap </text:span><text:span text:style-name="T82">在幹嘛</text:span></text:p>
            <text:p text:style-name="P19" loext:marker-style-name="T18"/>
            <text:p text:style-name="P7" loext:marker-style-name="T18"><text:span text:style-name="T19">想像你有一堆候選邊，每次都要找「最便宜的那條」。</text:span><text:span text:style-name="T18"/></text:p>
            <text:p text:style-name="P7" loext:marker-style-name="T18"><text:span text:style-name="T19">如果用普通 </text:span><text:span text:style-name="T20">list</text:span><text:span text:style-name="T19">：每次都要從頭掃到尾 → 很慢。</text:span></text:p>
            <text:p text:style-name="P7" loext:marker-style-name="T186"><text:span text:style-name="T187">改用 </text:span><text:span text:style-name="T188">Min-Heap</text:span><text:span text:style-name="T187">：</text:span></text:p>
            <text:p text:style-name="P7" loext:marker-style-name="T18"><text:span text:style-name="T187">最小值永遠自動浮到頂端，直接拿走就好</text:span><text:span text:style-name="T19">。</text:span></text:p>
            <text:p text:style-name="P7" loext:marker-style-name="T18"><text:span text:style-name="T189">放進去一個元素、或拿出頂端元素，只需要 </text:span><text:span text:style-name="T190">log N </text:span><text:span text:style-name="T189">的時間</text:span><text:span text:style-name="T19">。</text:span></text:p>
            <text:p text:style-name="P31" loext:marker-style-name="T18"><text:span text:style-name="T19">（</text:span><text:span text:style-name="T191">N = Heap </text:span><text:span text:style-name="T179">裡目前有幾個元素</text:span><text:span text:style-name="T19">）</text:span></text:p>
            <text:p text:style-name="P19" loext:marker-style-name="T18"/>
            <text:p text:style-name="P6" loext:marker-style-name="T81"><text:span text:style-name="T83">Lazy Prim </text:span><text:span text:style-name="T82">怎麼用這個 </text:span><text:span text:style-name="T83">Heap</text:span><text:span text:style-name="T82">？</text:span></text:p>
            <text:p text:style-name="P19" loext:marker-style-name="T18"/>
            <text:p text:style-name="P7" loext:marker-style-name="T18"><text:span text:style-name="T93">每當有新節點加入 </text:span><text:span text:style-name="T138">T</text:span><text:span text:style-name="T19">，</text:span><text:span text:style-name="T192">就把它</text:span><text:span text:style-name="T193">所有鄰邊</text:span><text:span text:style-name="T192">都 </text:span><text:span text:style-name="T194">push </text:span><text:span text:style-name="T192">進 </text:span><text:span text:style-name="T194">Heap</text:span><text:span text:style-name="T19">（</text:span><text:span text:style-name="T98">不論對方是否已在 </text:span><text:span text:style-name="T139">T </text:span><text:span text:style-name="T98">內</text:span><text:span text:style-name="T19">）。</text:span></text:p>
            <text:p text:style-name="P7" loext:marker-style-name="T18"><text:span text:style-name="T19">因此</text:span><text:span text:style-name="T195">同一個節點可能被多條邊重複放入 </text:span><text:span text:style-name="T196">Heap</text:span><text:span text:style-name="T19">，</text:span><text:span text:style-name="T20">Heap </text:span><text:span text:style-name="T19">中最多累積 </text:span><text:span text:style-name="T20">O(E) </text:span><text:span text:style-name="T19">個元素。</text:span></text:p>
            <text:p text:style-name="P31" loext:marker-style-name="T18"><text:span text:style-name="T98">這就是「</text:span><text:span text:style-name="T139">Lazy</text:span><text:span text:style-name="T98">（懶惰）」</text:span><text:span text:style-name="T19">：</text:span><text:span text:style-name="T197">不先整理，先全丟進去</text:span><text:span text:style-name="T19">，</text:span><text:span text:style-name="T198">拿出來時再判斷有沒有用</text:span><text:span text:style-name="T19">。</text:span></text:p>
            <text:p text:style-name="P19" loext:marker-style-name="T18"/>
            <text:p text:style-name="P6" loext:marker-style-name="T81"><text:span text:style-name="T82">為什麼</text:span><text:span text:style-name="T96">總花費是 </text:span><text:span text:style-name="T97">O(E log V)</text:span><text:span text:style-name="T82">？── 一步一步算</text:span></text:p>
            <text:p text:style-name="P19" loext:marker-style-name="T18"/>
            <text:p text:style-name="P28" loext:marker-style-name="T72"><text:span text:style-name="T73">問：</text:span><text:span text:style-name="T74">Heap </text:span><text:span text:style-name="T73">總共被 </text:span><text:span text:style-name="T74">push </text:span><text:span text:style-name="T73">幾次？</text:span></text:p>
            <text:p text:style-name="P7" loext:marker-style-name="T18"><text:span text:style-name="T19">答：</text:span><text:span text:style-name="T93">每條邊最多被放入一次，共 </text:span><text:span text:style-name="T138">E </text:span><text:span text:style-name="T93">條邊</text:span><text:span text:style-name="T19"> → 總 </text:span><text:span text:style-name="T20">push </text:span><text:span text:style-name="T19">次數 </text:span><text:span text:style-name="T20">= E </text:span><text:span text:style-name="T19">次。</text:span></text:p>
            <text:p text:style-name="P19" loext:marker-style-name="T18"><text:soft-page-break/></text:p>
            <text:p text:style-name="P28" loext:marker-style-name="T72"><text:span text:style-name="T73">問：</text:span><text:span text:style-name="T74">Heap </text:span><text:span text:style-name="T73">總共被 </text:span><text:span text:style-name="T74">pop </text:span><text:span text:style-name="T73">幾次？</text:span></text:p>
            <text:p text:style-name="P7" loext:marker-style-name="T18"><text:span text:style-name="T19">答：</text:span><text:span text:style-name="T198">放進去的東西最終都會被拿出來 → 總 </text:span><text:span text:style-name="T199">pop </text:span><text:span text:style-name="T198">次數 </text:span><text:span text:style-name="T199">= E </text:span><text:span text:style-name="T198">次</text:span><text:span text:style-name="T19">。</text:span></text:p>
            <text:p text:style-name="P19" loext:marker-style-name="T18"/>
            <text:p text:style-name="P28" loext:marker-style-name="T72"><text:span text:style-name="T73">問：一次 </text:span><text:span text:style-name="T74">push </text:span><text:span text:style-name="T73">或 </text:span><text:span text:style-name="T74">pop </text:span><text:span text:style-name="T73">要花多久？</text:span></text:p>
            <text:p text:style-name="P7" loext:marker-style-name="T18"><text:span text:style-name="T19">答：</text:span><text:span text:style-name="T20">Heap </text:span><text:span text:style-name="T19">是一棵樹，</text:span><text:span text:style-name="T20">Heap </text:span><text:span text:style-name="T19">裡有幾個元素，樹就有幾個節點。</text:span></text:p>
            <text:p text:style-name="P7" loext:marker-style-name="T18"><text:span text:style-name="T98">放入或拿走一個元素，最多只需要從根走到葉子（或反過來），也就是走「樹高」次</text:span><text:span text:style-name="T19">。</text:span></text:p>
            <text:p text:style-name="P7" loext:marker-style-name="T18"><text:span text:style-name="T169">樹高 </text:span><text:span text:style-name="T200">= log</text:span><text:span text:style-name="T169">（節點數）</text:span><text:span text:style-name="T200">= log E</text:span><text:span text:style-name="T19">。</text:span></text:p>
            <text:p text:style-name="P7" loext:marker-style-name="T18"><text:span text:style-name="T20">(</text:span><text:span text:style-name="T19">註：</text:span><text:span text:style-name="T201">因為 </text:span><text:span text:style-name="T202">Lazy Prim </text:span><text:span text:style-name="T201">的做法是：每條邊最多被 </text:span><text:span text:style-name="T202">push </text:span><text:span text:style-name="T201">進 </text:span><text:span text:style-name="T202">Heap </text:span><text:span text:style-name="T201">一次，圖裡總共有 </text:span><text:span text:style-name="T202">E </text:span><text:span text:style-name="T201">條邊</text:span><text:span text:style-name="T19">，所以 </text:span><text:span text:style-name="T20">Heap </text:span><text:span text:style-name="T19">裡最多同時存在 </text:span><text:span text:style-name="T20">E </text:span><text:span text:style-name="T19">個元素；也就是說：</text:span><text:span text:style-name="T98">節點數（</text:span><text:span text:style-name="T139">Heap </text:span><text:span text:style-name="T98">的大小）</text:span><text:span text:style-name="T139">= </text:span><text:span text:style-name="T98">最多 </text:span><text:span text:style-name="T139">E </text:span><text:span text:style-name="T98">個</text:span><text:span text:style-name="T20">)</text:span></text:p>
            <text:p text:style-name="P7" loext:marker-style-name="T18"><text:span text:style-name="T19">所以：一次 </text:span><text:span text:style-name="T20">push </text:span><text:span text:style-name="T19">或 </text:span><text:span text:style-name="T20">pop = O(log E)</text:span><text:span text:style-name="T19">。</text:span></text:p>
            <text:p text:style-name="P19" loext:marker-style-name="T18"/>
            <text:p text:style-name="P28" loext:marker-style-name="T72"><text:span text:style-name="T73">問：</text:span><text:span text:style-name="T203">log E </text:span><text:span text:style-name="T204">為什麼可以換成 </text:span><text:span text:style-name="T203">log V</text:span><text:span text:style-name="T204">？</text:span></text:p>
            <text:p text:style-name="P7" loext:marker-style-name="T18"><text:span text:style-name="T19">答：</text:span><text:span text:style-name="T141">圖裡邊數 </text:span><text:span text:style-name="T140">E </text:span><text:span text:style-name="T141">最多是 </text:span><text:span text:style-name="T140">V² </text:span><text:span text:style-name="T141">左右（每兩個節點之間各一條邊）</text:span><text:span text:style-name="T19">。</text:span></text:p>
            <text:p text:style-name="P7" loext:marker-style-name="T18"><text:span text:style-name="T19">所以 </text:span><text:span text:style-name="T200">log E ≤ log V² = 2 × log V</text:span><text:span text:style-name="T19">。</text:span></text:p>
            <text:p text:style-name="P7" loext:marker-style-name="T18"><text:span text:style-name="T20">2 × log V </text:span><text:span text:style-name="T19">在大 </text:span><text:span text:style-name="T20">O </text:span><text:span text:style-name="T19">符號裡，常數 </text:span><text:span text:style-name="T20">2 </text:span><text:span text:style-name="T19">可以去掉，就是 </text:span><text:span text:style-name="T20">O(log V)</text:span><text:span text:style-name="T19">。</text:span></text:p>
            <text:p text:style-name="P31" loext:marker-style-name="T18"><text:span text:style-name="T205">∴ O(log E) = O(log V)</text:span><text:span text:style-name="T19">，兩種寫法是同一個等級，考試都對。</text:span></text:p>
            <text:p text:style-name="P19" loext:marker-style-name="T18"/>
            <text:p text:style-name="P28" loext:marker-style-name="T72"><text:span text:style-name="T73">問：加起來總共多少？</text:span><text:span text:style-name="T72"/></text:p>
            <text:p text:style-name="P7" loext:marker-style-name="T18"><text:span text:style-name="T19">答：</text:span><text:span text:style-name="T18"/></text:p>
            <text:p text:style-name="P26" loext:marker-style-name="T18"><text:span text:style-name="T139">push E </text:span><text:span text:style-name="T98">次，每次 </text:span><text:span text:style-name="T139">O(log V)</text:span><text:span text:style-name="T20"> → E × log V = O(E log V)</text:span></text:p>
            <text:p text:style-name="P26" loext:marker-style-name="T18"><text:span text:style-name="T139">pop E </text:span><text:span text:style-name="T98">次，每次 </text:span><text:span text:style-name="T139">O(log V)</text:span><text:span text:style-name="T20"> → E × log V = O(E log V)</text:span></text:p>
            <text:p text:style-name="P26" loext:marker-style-name="T18"><text:span text:style-name="T19">兩個加起來：</text:span><text:span text:style-name="T20">O(E log V) + O(E log V) = O(2E log V)</text:span></text:p>
            <text:p text:style-name="P26" loext:marker-style-name="T18"><text:span text:style-name="T19">大 </text:span><text:span text:style-name="T20">O </text:span><text:span text:style-name="T19">忽略常數倍，</text:span><text:span text:style-name="T20">O(2E log V) = O(E log V)</text:span><text:span text:style-name="T19">。</text:span></text:p>
            <text:p text:style-name="P19" loext:marker-style-name="T18"/>
            <text:p text:style-name="P31" loext:marker-style-name="T18"><text:span text:style-name="T19">就像</text:span><text:span text:style-name="T198">「走 </text:span><text:span text:style-name="T199">2 </text:span><text:span text:style-name="T198">公里」和「走 </text:span><text:span text:style-name="T199">1 </text:span><text:span text:style-name="T198">公里」在量級上是同一個等級</text:span><text:span text:style-name="T19">，</text:span></text:p>
            <text:p text:style-name="P31" loext:marker-style-name="T18"><text:span text:style-name="T20">Big-O </text:span><text:span text:style-name="T19">只看「大概多少量級」，不管前面的常數係數。</text:span></text:p>
          </table:table-cell>
        </table:table-row>
      </table:table>
      <text:p text:style-name="P5"/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row table:style-name="表格30.1">
          <table:table-cell table:style-name="表格30.A1" office:value-type="string">
            <text:p text:style-name="P5" loext:marker-style-name="T160"><text:span text:style-name="T161">操作</text:span><text:span text:style-name="T160"/></text:p>
          </table:table-cell>
          <table:table-cell table:style-name="表格30.A1" office:value-type="string">
            <text:p text:style-name="P5" loext:marker-style-name="T160"><text:span text:style-name="T161">發生幾次</text:span><text:span text:style-name="T160"/></text:p>
          </table:table-cell>
          <table:table-cell table:style-name="表格30.A1" office:value-type="string">
            <text:p text:style-name="P5" loext:marker-style-name="T160"><text:span text:style-name="T161">每次花多久</text:span><text:span text:style-name="T160"/></text:p>
          </table:table-cell>
          <table:table-cell table:style-name="表格30.A1" office:value-type="string">
            <text:p text:style-name="P5" loext:marker-style-name="T160"><text:span text:style-name="T161">小計</text:span><text:span text:style-name="T160"/></text:p>
          </table:table-cell>
        </table:table-row>
        <table:table-row table:style-name="表格30.1">
          <table:table-cell table:style-name="表格30.A2" office:value-type="string">
            <text:p text:style-name="P7" loext:marker-style-name="T18"><text:span text:style-name="T20">push </text:span><text:span text:style-name="T19">進 </text:span><text:span text:style-name="T20">Heap</text:span></text:p>
          </table:table-cell>
          <table:table-cell table:style-name="表格30.A2" office:value-type="string">
            <text:p text:style-name="P7" loext:marker-style-name="T206"><text:span text:style-name="T207">E </text:span><text:span text:style-name="T208">次（每條邊一次）</text:span></text:p>
          </table:table-cell>
          <table:table-cell table:style-name="表格30.A2" office:value-type="string">
            <text:p text:style-name="P7" loext:marker-style-name="T18"><text:span text:style-name="T20">O(log E) = O(log V)</text:span><text:span text:style-name="T18"/></text:p>
          </table:table-cell>
          <table:table-cell table:style-name="表格30.A2" office:value-type="string">
            <text:p text:style-name="P7" loext:marker-style-name="T18"><text:span text:style-name="T20">O(E log V)</text:span><text:span text:style-name="T18"/></text:p>
          </table:table-cell>
        </table:table-row>
        <table:table-row table:style-name="表格30.1">
          <table:table-cell table:style-name="表格30.A3" office:value-type="string">
            <text:p text:style-name="P7" loext:marker-style-name="T18"><text:span text:style-name="T20">pop </text:span><text:span text:style-name="T19">出 </text:span><text:span text:style-name="T20">Heap</text:span></text:p>
          </table:table-cell>
          <table:table-cell table:style-name="表格30.A3" office:value-type="string">
            <text:p text:style-name="P7" loext:marker-style-name="T209"><text:span text:style-name="T210">E </text:span><text:span text:style-name="T211">次（放幾次拿幾次）</text:span></text:p>
          </table:table-cell>
          <table:table-cell table:style-name="表格30.A3" office:value-type="string">
            <text:p text:style-name="P7" loext:marker-style-name="T18"><text:span text:style-name="T20">O(log E) = O(log V)</text:span><text:span text:style-name="T18"/></text:p>
          </table:table-cell>
          <table:table-cell table:style-name="表格30.A3" office:value-type="string">
            <text:p text:style-name="P7" loext:marker-style-name="T18"><text:span text:style-name="T20">O(E log V)</text:span><text:span text:style-name="T18"/></text:p>
          </table:table-cell>
        </table:table-row>
        <table:table-row table:style-name="表格30.1">
          <table:table-cell table:style-name="表格30.A2" office:value-type="string">
            <text:p text:style-name="P7" loext:marker-style-name="T18"><text:span text:style-name="T19">節點加入 </text:span><text:span text:style-name="T20">T</text:span></text:p>
          </table:table-cell>
          <table:table-cell table:style-name="表格30.A2" office:value-type="string">
            <text:p text:style-name="P7" loext:marker-style-name="T18"><text:span text:style-name="T20">V </text:span><text:span text:style-name="T19">次</text:span></text:p>
          </table:table-cell>
          <table:table-cell table:style-name="表格30.A2" office:value-type="string">
            <text:p text:style-name="P7" loext:marker-style-name="T18"><text:span text:style-name="T20">O(1)</text:span><text:span text:style-name="T19">（直接標記）</text:span></text:p>
          </table:table-cell>
          <table:table-cell table:style-name="表格30.A2" office:value-type="string">
            <text:p text:style-name="P7" loext:marker-style-name="T18"><text:span text:style-name="T20">O(V)</text:span><text:span text:style-name="T19">，可忽略</text:span></text:p>
          </table:table-cell>
        </table:table-row>
        <table:table-row table:style-name="表格30.1">
          <table:table-cell table:style-name="表格30.A3" office:value-type="string">
            <text:p text:style-name="P5" loext:marker-style-name="T50"><text:span text:style-name="T52">總計</text:span><text:span text:style-name="T50"/></text:p>
          </table:table-cell>
          <table:table-cell table:style-name="表格30.A3" office:value-type="string">
            <text:p text:style-name="P5" loext:marker-style-name="T50"><text:span text:style-name="T51">—</text:span><text:span text:style-name="T50"/></text:p>
          </table:table-cell>
          <table:table-cell table:style-name="表格30.A3" office:value-type="string">
            <text:p text:style-name="P5" loext:marker-style-name="T50"><text:span text:style-name="T51">—</text:span><text:span text:style-name="T50"/></text:p>
          </table:table-cell>
          <table:table-cell table:style-name="表格30.A3" office:value-type="string">
            <text:p text:style-name="P5" loext:marker-style-name="T212"><text:span text:style-name="T213">O(E log V) + O(E log V) = O(E log V)</text:span><text:span text:style-name="T212"/></text:p>
          </table:table-cell>
        </table:table-row>
      </table:table>
      <text:p text:style-name="P5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5" loext:marker-style-name="T50"><text:span text:style-name="T51">✅ </text:span><text:span text:style-name="T52">考試最簡單記法</text:span></text:p>
            <text:p text:style-name="P19" loext:marker-style-name="T18"/>
            <text:p text:style-name="P7" loext:marker-style-name="T18"><text:span text:style-name="T98">每條邊進出 </text:span><text:span text:style-name="T139">Heap </text:span><text:span text:style-name="T98">各一次</text:span><text:span text:style-name="T19"> </text:span><text:span text:style-name="T20">= </text:span><text:span text:style-name="T97">O(E) </text:span><text:span text:style-name="T96">次操作</text:span></text:p>
            <text:p text:style-name="P7" loext:marker-style-name="T18"><text:span text:style-name="T200">Heap </text:span><text:span text:style-name="T169">大小最多 </text:span><text:span text:style-name="T200">E </text:span><text:span text:style-name="T20">→ </text:span><text:span text:style-name="T19">每次操作 </text:span><text:span text:style-name="T214">O(log E) = O(log V)</text:span></text:p>
            <text:p text:style-name="P28" loext:marker-style-name="T72"><text:span text:style-name="T74">→ </text:span><text:span text:style-name="T73">總計 </text:span><text:span text:style-name="T74">O(E log V)</text:span></text:p>
            <text:p text:style-name="P19" loext:marker-style-name="T18"/>
            <text:p text:style-name="P31" loext:marker-style-name="T18"><text:span text:style-name="T20">O(E log V) </text:span><text:span text:style-name="T19">和 </text:span><text:span text:style-name="T20">O(E log E) </text:span><text:span text:style-name="T19">是同一等級，兩種寫法考試都被接受。</text:span></text:p>
          </table:table-cell>
        </table:table-row>
      </table:table>
      <text:p text:style-name="P19" loext:marker-style-name="T18"/>
      <text:p text:style-name="P7" loext:marker-style-name="T18"><text:soft-page-break/><draw:frame draw:style-name="fr2" draw:name="影像3" text:anchor-type="as-char" svg:width="16cm" svg:height="12.234cm" draw:z-index="1"><draw:image xlink:href="Pictures/1000000000000550000003D4E548CBA8.png" xlink:type="simple" xlink:show="embed" xlink:actuate="onLoad" draw:mime-type="image/png"/></draw:frame></text:p>
      <text:p text:style-name="P19" loext:marker-style-name="T18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14" loext:marker-style-name="T69"><text:span text:style-name="T70">✅ </text:span><text:span text:style-name="T71">兩個版本怎麼選？</text:span></text:p>
            <text:p text:style-name="P7" loext:marker-style-name="T18"><text:span text:style-name="T19">稠密圖（</text:span><text:span text:style-name="T20">E ≈ V²</text:span><text:span text:style-name="T19">）：</text:span><text:span text:style-name="T20">O(V²) </text:span><text:span text:style-name="T19">矩陣版更省</text:span></text:p>
            <text:p text:style-name="P23" loext:marker-style-name="T61"><text:span text:style-name="T62">因為 </text:span><text:span text:style-name="T63">O(E log V) ≈ O(V² log V) </text:span><text:span text:style-name="T62">反而更慢</text:span></text:p>
            <text:p text:style-name="P7" loext:marker-style-name="T18"><text:span text:style-name="T19">稀疏∼一般圖（</text:span><text:span text:style-name="T20">E &lt;&lt; V²</text:span><text:span text:style-name="T19">）：</text:span><text:span text:style-name="T20">O(E log V) Heap </text:span><text:span text:style-name="T19">版更快</text:span></text:p>
            <text:p text:style-name="P38" loext:marker-style-name="T54"><text:span text:style-name="T55">判斷標準：</text:span><text:span text:style-name="T175">E </text:span><text:span text:style-name="T176">接近 </text:span><text:span text:style-name="T175">V² → </text:span><text:span text:style-name="T176">用矩陣；</text:span><text:span text:style-name="T175">E </text:span><text:span text:style-name="T176">遠小於 </text:span><text:span text:style-name="T175">V² → </text:span><text:span text:style-name="T176">用 </text:span><text:span text:style-name="T175">Heap</text:span></text:p>
          </table:table-cell>
        </table:table-row>
      </table:table>
      <text:p text:style-name="P5"/>
      <text:p text:style-name="P7" loext:marker-style-name="T18"><draw:frame draw:style-name="fr2" draw:name="影像4" text:anchor-type="as-char" svg:width="16cm" svg:height="8.941cm" draw:z-index="2"><draw:image xlink:href="Pictures/1000000000000550000002F8B3BF8B36.png" xlink:type="simple" xlink:show="embed" xlink:actuate="onLoad" draw:mime-type="image/png"/></draw:frame></text:p>
      <text:p text:style-name="P19" loext:marker-style-name="T18"/>
      <text:p text:style-name="Standard"><text:soft-page-break/></text:p>
      <text:h text:style-name="P8" text:outline-level="1" loext:marker-style-name="T21"><text:span text:style-name="T22">四、</text:span><text:span text:style-name="T21">Kruskal </text:span><text:span text:style-name="T22">演算法 ── 從邊開始，最小邊優先</text:span></text:h>
      <text:p text:style-name="P5"/>
      <text:h text:style-name="P9" text:outline-level="2" loext:marker-style-name="T23"><text:span text:style-name="T23">4-1 </text:span><text:span text:style-name="T24">核心概念（超新手版解釋）</text:span></text:h>
      <text:p text:style-name="P5"/>
      <text:p text:style-name="P11" loext:marker-style-name="T30"><text:span text:style-name="T31">還記得 </text:span><text:span text:style-name="T32">Prim </text:span><text:span text:style-name="T31">嗎？它像種一棵樹：先挑一個起點，再讓這棵樹一點一點往外長大。</text:span><text:span text:style-name="T32">Kruskal </text:span><text:span text:style-name="T31">的想法剛好相反 ── 它一開始連一棵樹都沒有，也完全不在乎「樹現在長在哪」。它眼裡只有「邊」，腦袋裡只有一句話：</text:span></text:p>
      <text:p text:style-name="P11" loext:marker-style-name="T30"><text:span text:style-name="T31">「把全世界最便宜的邊，一條一條撿起來；只要撿了不會繞成圈，就留著。」</text:span><text:span text:style-name="T30"/></text:p>
      <text:p text:style-name="P11" loext:marker-style-name="T30"><text:span text:style-name="T31">就這麼簡單。</text:span><text:span text:style-name="T215">Kruskal </text:span><text:span text:style-name="T216">不挑起點、不管順序、也不在乎現在散落著幾棵小樹</text:span><text:span text:style-name="T31">，它從頭到尾只做一件事 ── 貪心地撿便宜，撿到不能再撿為止。</text:span></text:p>
      <text:p text:style-name="P5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6" loext:marker-style-name="T25"><text:span text:style-name="T26">Kruskal </text:span><text:span text:style-name="T27">的完整流程（背這張就夠了）：</text:span></text:p>
            <text:p text:style-name="P7" loext:marker-style-name="T18"><text:span text:style-name="T19">第 </text:span><text:span text:style-name="T20">0 </text:span><text:span text:style-name="T19">步：</text:span><text:span text:style-name="T217">先把所有的邊，依權重「由小到大」排成一排</text:span><text:span text:style-name="T19">。</text:span></text:p>
            <text:p text:style-name="P7" loext:marker-style-name="T18"><text:span text:style-name="T19">然後</text:span><text:span text:style-name="T218">從最便宜的那條開始，一條一條拿起來</text:span><text:span text:style-name="T19">，</text:span><text:span text:style-name="T219">每條都只問同一個問題：它接上去會不會繞成圈</text:span><text:span text:style-name="T19">？</text:span></text:p>
          </table:table-cell>
        </table:table-row>
        <table:table-row table:style-name="表格33.1">
          <table:table-cell table:style-name="表格33.A2" office:value-type="string">
            <text:p text:style-name="P44" loext:marker-style-name="T99"><text:span text:style-name="T99"><text:s text:c="8"/>拿出目前最便宜的一條邊</text:span><text:span text:style-name="T99"/></text:p>
            <text:p text:style-name="P44" loext:marker-style-name="T99"><text:span text:style-name="T99"><text:s text:c="16"/>↓</text:span><text:span text:style-name="T99"/></text:p>
            <text:p text:style-name="P44" loext:marker-style-name="T99"><text:span text:style-name="T99"><text:s text:c="10"/>接上去會繞成圈嗎？</text:span><text:span text:style-name="T99"/></text:p>
            <text:p text:style-name="P44" loext:marker-style-name="T99"><text:span text:style-name="T99"><text:s text:c="13"/>/ <text:s text:c="9"/>\</text:span><text:span text:style-name="T99"/></text:p>
            <text:p text:style-name="P44" loext:marker-style-name="T99"><text:span text:style-name="T99"><text:s text:c="11"/>不會 <text:s text:c="9"/>會</text:span><text:span text:style-name="T99"/></text:p>
            <text:p text:style-name="P44" loext:marker-style-name="T99"><text:span text:style-name="T99"><text:s text:c="12"/>↓ <text:s text:c="11"/>↓</text:span><text:span text:style-name="T99"/></text:p>
            <text:p text:style-name="P44" loext:marker-style-name="T99"><text:span text:style-name="T99"><text:s text:c="8"/>收下，加入 <text:s text:c="6"/>丟掉，不要</text:span><text:span text:style-name="T99"/></text:p>
            <text:p text:style-name="P44" loext:marker-style-name="T99"><text:span text:style-name="T99"><text:s text:c="12"/>↓</text:span><text:span text:style-name="T99"/></text:p>
            <text:p text:style-name="P44" loext:marker-style-name="T99"><text:span text:style-name="T99"><text:s text:c="3"/>重複到「已收下 V-1 條邊」為止</text:span><text:span text:style-name="T99"/></text:p>
            <text:p text:style-name="P44" loext:marker-style-name="T99"><text:span text:style-name="T99"><text:s text:c="12"/>↓</text:span><text:span text:style-name="T99"/></text:p>
            <text:p text:style-name="P44" loext:marker-style-name="T99"><text:span text:style-name="T99"><text:s text:c="9"/>MST 完成！</text:span><text:span text:style-name="T99"/></text:p>
          </table:table-cell>
        </table:table-row>
      </table:table>
      <text:p text:style-name="P5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4" loext:marker-style-name="T54"><text:span text:style-name="T56">🔑 </text:span><text:span text:style-name="T55">一句話本質</text:span></text:p>
            <text:p text:style-name="P7" loext:marker-style-name="T18"><text:span text:style-name="T20">Kruskal ── </text:span><text:span text:style-name="T19">把邊由小到大排好，一條一條撿，不繞圈就收下。</text:span></text:p>
          </table:table-cell>
        </table:table-row>
      </table:table>
      <text:p text:style-name="P5"/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6" loext:marker-style-name="T25"><text:span text:style-name="T27">為什麼「每次撿最便宜」最後剛好會最省？</text:span><text:span text:style-name="T25"/></text:p>
            <text:p text:style-name="P7" loext:marker-style-name="T18"><text:span text:style-name="T19">你可能會擔心：每次只顧眼前最便宜，會不會撿到後面反而虧？</text:span><text:span text:style-name="T18"/></text:p>
            <text:p text:style-name="P7" loext:marker-style-name="T18"><text:span text:style-name="T19">直覺是這樣：任何時刻，圖上的點都被分成「已經連起來的那幾坨」。要把其中兩坨接在一起，當然挑「跨在它們之間、最便宜的那條邊」最划算，挑貴的一定吃虧。</text:span><text:span text:style-name="T18"/></text:p>
            <text:p text:style-name="P7" loext:marker-style-name="T18"><text:span text:style-name="T19">而 </text:span><text:span text:style-name="T20">Kruskal </text:span><text:span text:style-name="T19">由小到大撿邊，等於每一步都在挑「跨越某條分界的最便宜邊」，所以從頭到尾都不吃虧，最後加起來自然最省。（課本把這個保證叫 </text:span><text:span text:style-name="T20">Cut Property</text:span><text:span text:style-name="T19">，切割性質。）</text:span></text:p>
          </table:table-cell>
        </table:table-row>
      </table:table>
      <text:p text:style-name="P5"/>
      <text:h text:style-name="P9" text:outline-level="2" loext:marker-style-name="T23"><text:span text:style-name="T23">4-2 </text:span><text:span text:style-name="T24">完整圖解範例（用最小的例子走一遍）</text:span></text:h>
      <text:p text:style-name="P5"/>
      <text:p text:style-name="P11" loext:marker-style-name="T30"><text:span text:style-name="T31">我們用一個最小、最好懂的例子：只有 </text:span><text:span text:style-name="T32">4 </text:span><text:span text:style-name="T31">個點 </text:span><text:span text:style-name="T32">A</text:span><text:span text:style-name="T31">、</text:span><text:span text:style-name="T32">B</text:span><text:span text:style-name="T31">、</text:span><text:span text:style-name="T32">C</text:span><text:span text:style-name="T31">、</text:span><text:span text:style-name="T32">D</text:span><text:span text:style-name="T31">，</text:span><text:span text:style-name="T32">4 </text:span><text:span text:style-name="T31">條邊。請把重點放在「什麼時候要跳過」這件事上。</text:span></text:p>
      <text:p text:style-name="P11" loext:marker-style-name="T30"><text:span text:style-name="T31">範例圖：</text:span><text:span text:style-name="T32">AB=1</text:span><text:span text:style-name="T31">、</text:span><text:span text:style-name="T32">BC=2</text:span><text:span text:style-name="T31">、</text:span><text:span text:style-name="T32">AC=3</text:span><text:span text:style-name="T31">、</text:span><text:span text:style-name="T32">CD=4</text:span><text:span text:style-name="T31">。其中 </text:span><text:span text:style-name="T32">A</text:span><text:span text:style-name="T31">、</text:span><text:span text:style-name="T32">B</text:span><text:span text:style-name="T31">、</text:span><text:span text:style-name="T32">C </text:span><text:span text:style-name="T31">三個點互相連著，剛好圍成一個三角形；</text:span><text:span text:style-name="T32">D </text:span><text:span text:style-name="T31">只接在 </text:span><text:span text:style-name="T32">C </text:span><text:span text:style-name="T31">旁邊。</text:span></text:p>
      <text:p text:style-name="P5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44" loext:marker-style-name="T99"><text:span text:style-name="T99">原始圖：</text:span><text:span text:style-name="T99"/></text:p>
            <text:p text:style-name="P45" loext:marker-style-name="T99"/>
            <text:p text:style-name="P44" loext:marker-style-name="T99"><text:soft-page-break/><text:span text:style-name="T99"><text:s text:c="8"/>A</text:span><text:span text:style-name="T99"/></text:p>
            <text:p text:style-name="P44" loext:marker-style-name="T99"><text:span text:style-name="T99"><text:s text:c="7"/>/ \</text:span><text:span text:style-name="T99"/></text:p>
            <text:p text:style-name="P44" loext:marker-style-name="T99"><text:span text:style-name="T99"><text:s text:c="6"/>1 <text:s text:c="2"/>3 <text:s text:c="7"/>（AB=1、AC=3）</text:span><text:span text:style-name="T99"/></text:p>
            <text:p text:style-name="P44" loext:marker-style-name="T99"><text:span text:style-name="T99"><text:s text:c="5"/>/ <text:s text:c="4"/>\</text:span><text:span text:style-name="T99"/></text:p>
            <text:p text:style-name="P44" loext:marker-style-name="T99"><text:span text:style-name="T99"><text:s text:c="4"/>B---2---C---4---D <text:s text:c="3"/>（BC=2、CD=4）</text:span><text:span text:style-name="T99"/></text:p>
            <text:p text:style-name="P45" loext:marker-style-name="T99"/>
            <text:p text:style-name="P44" loext:marker-style-name="T99"><text:span text:style-name="T99">所有邊排序（由小到大）：AB=1, BC=2, AC=3, CD=4</text:span><text:span text:style-name="T99"/></text:p>
          </table:table-cell>
        </table:table-row>
      </table:table>
      <text:p text:style-name="P5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24" loext:marker-style-name="T81"><text:span text:style-name="T83">Step 1</text:span><text:span text:style-name="T82">：拿最小邊 </text:span><text:span text:style-name="T83">AB = 1</text:span></text:p>
            <text:p text:style-name="P32" loext:marker-style-name="T99"><text:span text:style-name="T99">目前分組：{A} {B} {C} {D} <text:s text:c="3"/>← 4 坨</text:span><text:span text:style-name="T99"/></text:p>
            <text:p text:style-name="P32" loext:marker-style-name="T99"><text:span text:style-name="T99">A 在 {A}、B 在 {B} → 不同坨 → 收下！</text:span><text:span text:style-name="T99"/></text:p>
            <text:p text:style-name="P32" loext:marker-style-name="T99"><text:span text:style-name="T99">合併後：{A,B} {C} {D} <text:s text:c="7"/>← 剩 3 坨</text:span><text:span text:style-name="T99"/></text:p>
            <text:p text:style-name="P32" loext:marker-style-name="T99"><text:span text:style-name="T99">已收邊：AB（1 條）</text:span><text:span text:style-name="T99"/></text:p>
          </table:table-cell>
        </table:table-row>
        <table:table-row table:style-name="表格37.1">
          <table:table-cell table:style-name="表格37.A1" office:value-type="string">
            <text:p text:style-name="P24" loext:marker-style-name="T81"><text:span text:style-name="T83">Step 2</text:span><text:span text:style-name="T82">：拿次小邊 </text:span><text:span text:style-name="T83">BC = 2</text:span></text:p>
            <text:p text:style-name="P32" loext:marker-style-name="T99"><text:span text:style-name="T99">目前分組：{A,B} {C} {D}</text:span><text:span text:style-name="T99"/></text:p>
            <text:p text:style-name="P32" loext:marker-style-name="T99"><text:span text:style-name="T99">B 在 {A,B}、C 在 {C} → 不同坨 → 收下！</text:span><text:span text:style-name="T99"/></text:p>
            <text:p text:style-name="P32" loext:marker-style-name="T99"><text:span text:style-name="T99">合併後：{A,B,C} {D} <text:s text:c="9"/>← 剩 2 坨</text:span><text:span text:style-name="T99"/></text:p>
            <text:p text:style-name="P32" loext:marker-style-name="T99"><text:span text:style-name="T99">已收邊：AB, BC（2 條）</text:span><text:span text:style-name="T99"/></text:p>
          </table:table-cell>
        </table:table-row>
        <table:table-row table:style-name="表格37.1">
          <table:table-cell table:style-name="表格37.A3" office:value-type="string">
            <text:p text:style-name="P24" loext:marker-style-name="T40"><text:span text:style-name="T41">Step 3</text:span><text:span text:style-name="T42">：拿 </text:span><text:span text:style-name="T41">AC = 3 → ⛔ </text:span><text:span text:style-name="T42">跳過</text:span></text:p>
            <text:p text:style-name="P32" loext:marker-style-name="T99"><text:span text:style-name="T99">目前分組：{A,B,C} {D}</text:span><text:span text:style-name="T99"/></text:p>
            <text:p text:style-name="P32" loext:marker-style-name="T99"><text:span text:style-name="T99">A 和 C 已經都在 {A,B,C} 同一坨 → 接上去會繞圈！</text:span><text:span text:style-name="T99"/></text:p>
            <text:p text:style-name="P32" loext:marker-style-name="T99"><text:span text:style-name="T99">（A─B─C 已經連成一個三角形，再加 A─C 只是多繞一圈）</text:span><text:span text:style-name="T99"/></text:p>
            <text:p text:style-name="P32" loext:marker-style-name="T99"><text:span text:style-name="T99">⛔ 丟掉 AC = 3</text:span><text:span text:style-name="T99"/></text:p>
          </table:table-cell>
        </table:table-row>
        <table:table-row table:style-name="表格37.1">
          <table:table-cell table:style-name="表格37.A1" office:value-type="string">
            <text:p text:style-name="P24" loext:marker-style-name="T81"><text:span text:style-name="T83">Step 4</text:span><text:span text:style-name="T82">：拿 </text:span><text:span text:style-name="T83">CD = 4 ← </text:span><text:span text:style-name="T82">最後一條</text:span></text:p>
            <text:p text:style-name="P32" loext:marker-style-name="T99"><text:span text:style-name="T99">目前分組：{A,B,C} {D}</text:span><text:span text:style-name="T99"/></text:p>
            <text:p text:style-name="P32" loext:marker-style-name="T99"><text:span text:style-name="T99">C 在 {A,B,C}、D 在 {D} → 不同坨 → 收下！</text:span><text:span text:style-name="T99"/></text:p>
            <text:p text:style-name="P32" loext:marker-style-name="T99"><text:span text:style-name="T99">合併後：{A,B,C,D} <text:s text:c="11"/>← 只剩 1 坨，全部連通！</text:span><text:span text:style-name="T99"/></text:p>
            <text:p text:style-name="P32" loext:marker-style-name="T99"><text:span text:style-name="T99">已收邊：AB, BC, CD（3 條 = V-1 ✅）</text:span><text:span text:style-name="T99"/></text:p>
          </table:table-cell>
        </table:table-row>
        <table:table-row table:style-name="表格37.1">
          <table:table-cell table:style-name="表格37.A5" office:value-type="string">
            <text:p text:style-name="P24" loext:marker-style-name="T47"><text:span text:style-name="T48">✅ MST </text:span><text:span text:style-name="T49">完成</text:span></text:p>
            <text:p text:style-name="P16" loext:marker-style-name="T18"><text:span text:style-name="T20">MST </text:span><text:span text:style-name="T19">邊集合：</text:span><text:span text:style-name="T20">AB=1, BC=2, CD=4</text:span></text:p>
            <text:p text:style-name="P16" loext:marker-style-name="T66"><text:span text:style-name="T67">總權重：</text:span><text:span text:style-name="T68">1 + 2 + 4 = 7</text:span></text:p>
            <text:p text:style-name="P40" loext:marker-style-name="T18"><text:span text:style-name="T19">邊數驗證：</text:span><text:span text:style-name="T20">V-1 = 4-1 = 3 </text:span><text:span text:style-name="T19">條 ✅</text:span></text:p>
          </table:table-cell>
        </table:table-row>
      </table:table>
      <text:p text:style-name="P5"/>
      <text:h text:style-name="P9" text:outline-level="2" loext:marker-style-name="T23"><text:span text:style-name="T23">4-3 </text:span><text:span text:style-name="T24">那個很煩的判斷 → 用 </text:span><text:span text:style-name="T23">Union-Find</text:span><text:span text:style-name="T24">（並查集）自動化</text:span></text:h>
      <text:p text:style-name="P5"/>
      <text:p text:style-name="P11" loext:marker-style-name="T30"><text:span text:style-name="T31">回頭看上面四步，真正花腦力的其實只有一件事：每拿一條邊，都得判斷「這兩個端點，是不是已經在同一坨了？」── 同一坨就會繞圈、必須跳過；不同坨才能收。</text:span><text:span text:style-name="T30"/></text:p>
      <text:p text:style-name="P11" loext:marker-style-name="T30"><text:span text:style-name="T32">4 </text:span><text:span text:style-name="T31">個點用眼睛分還很輕鬆；但考題動輒 </text:span><text:span text:style-name="T32">7</text:span><text:span text:style-name="T31">、</text:span><text:span text:style-name="T32">10 </text:span><text:span text:style-name="T31">個點，邊一多，用眼睛追蹤每個點屬於哪一坨就會又慢又容易看錯。我們需要一個能「秒答兩點是否同坨」的小工具 ── 它就是 </text:span><text:span text:style-name="T32">Union-Find</text:span><text:span text:style-name="T31">（並查集）。</text:span></text:p>
      <text:p text:style-name="P5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6" loext:marker-style-name="T25"><text:span text:style-name="T26">Union-Find </text:span><text:span text:style-name="T27">只做兩件事：</text:span></text:p>
            <text:p text:style-name="P7" loext:marker-style-name="T18"><text:span text:style-name="T20">Find(x)</text:span><text:span text:style-name="T19">：問「</text:span><text:span text:style-name="T20">x </text:span><text:span text:style-name="T19">現在屬於哪一坨？」（回傳那一坨的代表人）。</text:span></text:p>
            <text:p text:style-name="P7" loext:marker-style-name="T18"><text:span text:style-name="T20">Union(x, y)</text:span><text:span text:style-name="T19">：把 </text:span><text:span text:style-name="T20">x </text:span><text:span text:style-name="T19">和 </text:span><text:span text:style-name="T20">y </text:span><text:span text:style-name="T19">各自的那一坨，合併成一坨。</text:span></text:p>
            <text:p text:style-name="P7" loext:marker-style-name="T18"><text:span text:style-name="T19">對應到 </text:span><text:span text:style-name="T20">Kruskal</text:span><text:span text:style-name="T19">：用 </text:span><text:span text:style-name="T20">Find </text:span><text:span text:style-name="T19">判斷會不會繞圈，用 </text:span><text:span text:style-name="T20">Union </text:span><text:span text:style-name="T19">在收邊時合併兩坨。</text:span></text:p>
          </table:table-cell>
        </table:table-row>
      </table:table>
      <text:p text:style-name="P5"/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44" loext:marker-style-name="T99"><text:span text:style-name="T99">【Find 操作】：回答「x 現在屬於哪一坨」</text:span><text:span text:style-name="T99"/></text:p>
            <text:p text:style-name="P44" loext:marker-style-name="T99"><text:span text:style-name="T99">初始：每個點自己一坨，代表人就是自己</text:span><text:span text:style-name="T99"/></text:p>
            <text:p text:style-name="P44" loext:marker-style-name="T99"><text:span text:style-name="T99"><text:s text:c="3"/>點： <text:s/>A <text:s text:c="2"/>B <text:s text:c="2"/>C <text:s text:c="2"/>D</text:span><text:span text:style-name="T99"/></text:p>
            <text:p text:style-name="P44" loext:marker-style-name="T99"><text:span text:style-name="T99"><text:s text:c="3"/>代表：A <text:s text:c="2"/>B <text:s text:c="2"/>C <text:s text:c="2"/>D</text:span><text:span text:style-name="T99"/></text:p>
            <text:p text:style-name="P44" loext:marker-style-name="T99"><text:span text:style-name="T99"><text:s text:c="3"/>分組：{A} {B} {C} {D}</text:span><text:span text:style-name="T99"/></text:p>
            <text:p text:style-name="P44" loext:marker-style-name="T99"><text:soft-page-break/><text:span text:style-name="T99">──────────────────────────────────────</text:span><text:span text:style-name="T99"/></text:p>
            <text:p text:style-name="P44" loext:marker-style-name="T99"><text:span text:style-name="T99">【Union 操作】：把兩坨合併（對照上面的例子）</text:span><text:span text:style-name="T99"/></text:p>
            <text:p text:style-name="P44" loext:marker-style-name="T99"><text:span text:style-name="T99"><text:s text:c="3"/>Union(A, B)：把 B 的代表改成 A</text:span><text:span text:style-name="T99"/></text:p>
            <text:p text:style-name="P44" loext:marker-style-name="T99"><text:span text:style-name="T99"><text:s text:c="6"/>代表：A <text:s text:c="2"/>A <text:s text:c="2"/>C <text:s text:c="2"/>D <text:s text:c="4"/>分組：{A,B} {C} {D}</text:span><text:span text:style-name="T99"/></text:p>
            <text:p text:style-name="P44" loext:marker-style-name="T99"><text:span text:style-name="T99"><text:s text:c="3"/>Union(B, C)：Find(B)=A、Find(C)=C，不同 → 合併</text:span><text:span text:style-name="T99"/></text:p>
            <text:p text:style-name="P44" loext:marker-style-name="T99"><text:span text:style-name="T99"><text:s text:c="6"/>代表：A <text:s text:c="2"/>A <text:s text:c="2"/>A <text:s text:c="2"/>D <text:s text:c="4"/>分組：{A,B,C} {D}</text:span><text:span text:style-name="T99"/></text:p>
            <text:p text:style-name="P44" loext:marker-style-name="T99"><text:span text:style-name="T99">──────────────────────────────────────</text:span><text:span text:style-name="T99"/></text:p>
            <text:p text:style-name="P44" loext:marker-style-name="T99"><text:span text:style-name="T99"><text:s text:c="3"/>問：要不要收 A─C？</text:span><text:span text:style-name="T99"/></text:p>
            <text:p text:style-name="P44" loext:marker-style-name="T99"><text:span text:style-name="T99"><text:s text:c="6"/>Find(A)=A、Find(C)=A → 相同！→ 跳過（會繞圈）</text:span><text:span text:style-name="T99"/></text:p>
            <text:p text:style-name="P44" loext:marker-style-name="T99"><text:span text:style-name="T99">核心口訣：同一坨 → 跳過；　不同坨 → 收下、合併</text:span><text:span text:style-name="T99"/></text:p>
          </table:table-cell>
        </table:table-row>
      </table:table>
      <text:p text:style-name="P5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6" loext:marker-style-name="T25"><text:span text:style-name="T26">Kruskal × Union-Find</text:span><text:span text:style-name="T27">：完整對應</text:span></text:p>
            <text:p text:style-name="P7" loext:marker-style-name="T18"><text:span text:style-name="T20">① </text:span><text:span text:style-name="T19">依序拿出已排好的最便宜邊 </text:span><text:span text:style-name="T20">(u, v)</text:span><text:span text:style-name="T19">。</text:span></text:p>
            <text:p text:style-name="P7" loext:marker-style-name="T18"><text:span text:style-name="T20">② </text:span><text:span text:style-name="T19">算 </text:span><text:span text:style-name="T20">Find(u) </text:span><text:span text:style-name="T19">和 </text:span><text:span text:style-name="T20">Find(v)</text:span><text:span text:style-name="T19">。</text:span></text:p>
            <text:p text:style-name="P7" loext:marker-style-name="T18"><text:span text:style-name="T20">③ </text:span><text:span text:style-name="T19">兩者不同（不同坨）→ 收下這條邊，並 </text:span><text:span text:style-name="T20">Union(u, v) </text:span><text:span text:style-name="T19">合併。</text:span></text:p>
            <text:p text:style-name="P7" loext:marker-style-name="T18"><text:span text:style-name="T20">④ </text:span><text:span text:style-name="T19">兩者相同（同坨）→ 跳過（加了會繞圈）。</text:span></text:p>
            <text:p text:style-name="P7" loext:marker-style-name="T18"><text:span text:style-name="T20">⑤ </text:span><text:span text:style-name="T19">收滿 </text:span><text:span text:style-name="T20">V-1 </text:span><text:span text:style-name="T19">條邊就結束，</text:span><text:span text:style-name="T20">MST </text:span><text:span text:style-name="T19">完成。</text:span></text:p>
          </table:table-cell>
        </table:table-row>
      </table:table>
      <text:p text:style-name="P5"/>
      <text:h text:style-name="P9" text:outline-level="2" loext:marker-style-name="T23"><text:span text:style-name="T23">4-4 Kruskal </text:span><text:span text:style-name="T24">演算法（虛擬碼 </text:span><text:span text:style-name="T23">Pseudocode</text:span><text:span text:style-name="T24">）</text:span></text:h>
      <text:p text:style-name="P5"/>
      <text:p text:style-name="P11" loext:marker-style-name="T30"><text:span text:style-name="T31">把上面的流程寫成虛擬碼，乾淨又好背 ── 考試手寫演算法時，照這個架構寫就對了。</text:span><text:span text:style-name="T30"/></text:p>
      <text:p text:style-name="P5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42" loext:marker-style-name="T156"><text:span text:style-name="T156">// Kruskal </text:span><text:span text:style-name="T157">主演算法</text:span></text:p>
            <text:p text:style-name="P42" loext:marker-style-name="T158"><text:span text:style-name="T158">KRUSKAL(V, E):</text:span><text:span text:style-name="T158"/></text:p>
            <text:p text:style-name="P42" loext:marker-style-name="T158"><text:span text:style-name="T158"><text:s text:c="4"/></text:span><text:span text:style-name="T159">將 </text:span><text:span text:style-name="T158">E </text:span><text:span text:style-name="T159">中所有邊，依權重 </text:span><text:span text:style-name="T158">w </text:span><text:span text:style-name="T159">由小到大排序</text:span></text:p>
            <text:p text:style-name="P42" loext:marker-style-name="T158"><text:span text:style-name="T158"><text:s text:c="4"/>for each </text:span><text:span text:style-name="T159">節點 </text:span><text:span text:style-name="T158">v in V:</text:span></text:p>
            <text:p text:style-name="P42" loext:marker-style-name="T158"><text:span text:style-name="T158"><text:s text:c="8"/>MAKE-SET(v) <text:s text:c="13"/>// </text:span><text:span text:style-name="T159">每個點自成一坨</text:span></text:p>
            <text:p text:style-name="P42" loext:marker-style-name="T158"><text:span text:style-name="T158"><text:s text:c="4"/>MST <text:s text:c="2"/>← { } <text:s text:c="17"/>// </text:span><text:span text:style-name="T159">存放選到的邊</text:span></text:p>
            <text:p text:style-name="P42" loext:marker-style-name="T158"><text:span text:style-name="T158"><text:s text:c="4"/>total ← 0 <text:s text:c="19"/>// </text:span><text:span text:style-name="T159">累計權重</text:span></text:p>
            <text:p text:style-name="P43" loext:marker-style-name="T158"/>
            <text:p text:style-name="P42" loext:marker-style-name="T158"><text:span text:style-name="T158"><text:s text:c="4"/>for each </text:span><text:span text:style-name="T159">邊 </text:span><text:span text:style-name="T158">(u, v, w) in E </text:span><text:span text:style-name="T159">（依權重由小到大）</text:span><text:span text:style-name="T158">:</text:span></text:p>
            <text:p text:style-name="P42" loext:marker-style-name="T158"><text:span text:style-name="T158"><text:s text:c="8"/>if FIND(u) ≠ FIND(v): <text:s text:c="3"/>// </text:span><text:span text:style-name="T159">不同坨 → 不會繞圈</text:span></text:p>
            <text:p text:style-name="P42" loext:marker-style-name="T158"><text:span text:style-name="T158"><text:s text:c="12"/></text:span><text:span text:style-name="T159">將 </text:span><text:span text:style-name="T158">(u, v) </text:span><text:span text:style-name="T159">加入 </text:span><text:span text:style-name="T158">MST</text:span></text:p>
            <text:p text:style-name="P42" loext:marker-style-name="T158"><text:span text:style-name="T158"><text:s text:c="12"/>total ← total + w</text:span><text:span text:style-name="T158"/></text:p>
            <text:p text:style-name="P42" loext:marker-style-name="T158"><text:span text:style-name="T158"><text:s text:c="12"/>UNION(u, v) <text:s text:c="9"/>// </text:span><text:span text:style-name="T159">合併兩坨</text:span></text:p>
            <text:p text:style-name="P42" loext:marker-style-name="T158"><text:span text:style-name="T158"><text:s text:c="8"/>if |MST| = V − 1: <text:s text:c="7"/>// </text:span><text:span text:style-name="T159">已收滿 </text:span><text:span text:style-name="T158">V−1 </text:span><text:span text:style-name="T159">條，結束</text:span></text:p>
            <text:p text:style-name="P42" loext:marker-style-name="T158"><text:span text:style-name="T158"><text:s text:c="12"/>break</text:span><text:span text:style-name="T158"/></text:p>
            <text:p text:style-name="P43" loext:marker-style-name="T158"/>
            <text:p text:style-name="P42" loext:marker-style-name="T158"><text:span text:style-name="T158"><text:s text:c="4"/>return MST, total</text:span><text:span text:style-name="T158"/></text:p>
          </table:table-cell>
        </table:table-row>
        <table:table-row table:style-name="表格41.1">
          <table:table-cell table:style-name="表格41.A1" office:value-type="string">
            <text:p text:style-name="P42" loext:marker-style-name="T156"><text:span text:style-name="T156">// Union-Find</text:span><text:span text:style-name="T157">（並查集）：三個基本操作</text:span></text:p>
            <text:p text:style-name="P42" loext:marker-style-name="T158"><text:span text:style-name="T158">MAKE-SET(x):</text:span><text:span text:style-name="T158"/></text:p>
            <text:p text:style-name="P42" loext:marker-style-name="T158"><text:span text:style-name="T158"><text:s text:c="4"/>parent[x] ← x <text:s text:c="15"/>// </text:span><text:span text:style-name="T159">一開始自己是自己的代表</text:span></text:p>
            <text:p text:style-name="P43" loext:marker-style-name="T158"/>
            <text:p text:style-name="P42" loext:marker-style-name="T158"><text:span text:style-name="T158">FIND(x): <text:s text:c="24"/>// </text:span><text:span text:style-name="T159">找 </text:span><text:span text:style-name="T158">x </text:span><text:span text:style-name="T159">那一坨的代表人</text:span></text:p>
            <text:p text:style-name="P42" loext:marker-style-name="T158"><text:span text:style-name="T158"><text:s text:c="4"/>while parent[x] ≠ x:</text:span><text:span text:style-name="T158"/></text:p>
            <text:p text:style-name="P42" loext:marker-style-name="T158"><text:span text:style-name="T158"><text:s text:c="8"/>x ← parent[x]</text:span><text:span text:style-name="T158"/></text:p>
            <text:p text:style-name="P42" loext:marker-style-name="T158"><text:span text:style-name="T158"><text:s text:c="4"/>return x</text:span><text:span text:style-name="T158"/></text:p>
            <text:p text:style-name="P43" loext:marker-style-name="T158"/>
            <text:p text:style-name="P42" loext:marker-style-name="T158"><text:span text:style-name="T158">UNION(x, y): <text:s text:c="20"/>// </text:span><text:span text:style-name="T159">合併兩坨</text:span></text:p>
            <text:p text:style-name="P42" loext:marker-style-name="T158"><text:span text:style-name="T158"><text:s text:c="4"/>rx ← FIND(x); <text:s/>ry ← FIND(y)</text:span><text:span text:style-name="T158"/></text:p>
            <text:p text:style-name="P42" loext:marker-style-name="T158"><text:span text:style-name="T158"><text:s text:c="4"/>if rx = ry: return <text:s text:c="10"/>// </text:span><text:span text:style-name="T159">本來就同坨，免合併</text:span></text:p>
            <text:p text:style-name="P42" loext:marker-style-name="T158"><text:span text:style-name="T158"><text:s text:c="4"/>parent[rx] ← ry <text:s text:c="13"/>// </text:span><text:span text:style-name="T159">把一坨接到另一坨底下</text:span></text:p>
          </table:table-cell>
        </table:table-row>
      </table:table>
      <text:p text:style-name="P5"/>
      <table:table table:name="表格42" table:style-name="表格42">
        <table:table-column table:style-name="表格42.A"/>
        <text:soft-page-break/>
        <table:table-row table:style-name="表格42.1">
          <table:table-cell table:style-name="表格42.A1" office:value-type="string">
            <text:p text:style-name="P14" loext:marker-style-name="T54"><text:span text:style-name="T55">考試加分：兩個讓 </text:span><text:span text:style-name="T56">Union-Find </text:span><text:span text:style-name="T55">快到飛起的優化</text:span></text:p>
            <text:p text:style-name="P7" loext:marker-style-name="T18"><text:span text:style-name="T20">① </text:span><text:span text:style-name="T19">路徑壓縮（</text:span><text:span text:style-name="T20">Path Compression</text:span><text:span text:style-name="T19">）：</text:span><text:span text:style-name="T20">FIND </text:span><text:span text:style-name="T19">時順手把沿路經過的點直接指向代表人，下次再查幾乎瞬間完成。</text:span></text:p>
            <text:p text:style-name="P7" loext:marker-style-name="T18"><text:span text:style-name="T20">② </text:span><text:span text:style-name="T19">按秩合併（</text:span><text:span text:style-name="T20">Union by Rank / Size</text:span><text:span text:style-name="T19">）：</text:span><text:span text:style-name="T20">UNION </text:span><text:span text:style-name="T19">時把「矮的那坨」接到「高的那坨」底下，避免樹越接越高。</text:span></text:p>
            <text:p text:style-name="P7" loext:marker-style-name="T18"><text:span text:style-name="T19">兩個一起用，每次 </text:span><text:span text:style-name="T20">Find / Union </text:span><text:span text:style-name="T19">幾乎是 </text:span><text:span text:style-name="T20">O(1)</text:span><text:span text:style-name="T19">（嚴格說是 </text:span><text:span text:style-name="T20">O(α(V))</text:span><text:span text:style-name="T19">，</text:span><text:span text:style-name="T20">α </text:span><text:span text:style-name="T19">是反阿克曼函數，實務上永遠 ≤ </text:span><text:span text:style-name="T20">4</text:span><text:span text:style-name="T19">）。</text:span></text:p>
          </table:table-cell>
        </table:table-row>
      </table:table>
      <text:p text:style-name="P5"/>
      <text:h text:style-name="P9" text:outline-level="2" loext:marker-style-name="T23"><text:span text:style-name="T23">4-5 Kruskal </text:span><text:span text:style-name="T24">時間複雜度 ── 逐步推導</text:span></text:h>
      <text:p text:style-name="P5"/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6" loext:marker-style-name="T25"><text:span text:style-name="T27">結論：</text:span><text:span text:style-name="T26">Kruskal </text:span><text:span text:style-name="T27">時間複雜度 </text:span><text:span text:style-name="T26">= O(E log E)</text:span></text:p>
            <text:p text:style-name="P7" loext:marker-style-name="T18"><text:span text:style-name="T19">也可寫成 </text:span><text:span text:style-name="T20">O(E log V)</text:span><text:span text:style-name="T19">，兩者在 </text:span><text:span text:style-name="T20">Big-O </text:span><text:span text:style-name="T19">意義下相等（見後文說明）。</text:span></text:p>
          </table:table-cell>
        </table:table-row>
      </table:table>
      <text:p text:style-name="P5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6" loext:marker-style-name="T15"><text:span text:style-name="T16">Kruskal </text:span><text:span text:style-name="T17">分成兩個獨立階段：</text:span></text:p>
            <text:p text:style-name="P6" loext:marker-style-name="T81"><text:span text:style-name="T82">階段一：排序所有邊</text:span><text:span text:style-name="T81"/></text:p>
            <text:p text:style-name="P6" loext:marker-style-name="T81"><text:span text:style-name="T82">階段二：用 </text:span><text:span text:style-name="T83">Union-Find </text:span><text:span text:style-name="T82">逐條處理每條邊</text:span></text:p>
          </table:table-cell>
        </table:table-row>
      </table:table>
      <text:p text:style-name="P5"/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6" loext:marker-style-name="T15"><text:span text:style-name="T17">【階段一】排序所有邊 → </text:span><text:span text:style-name="T16">O(E log E)</text:span></text:p>
            <text:p text:style-name="P19" loext:marker-style-name="T18"/>
            <text:p text:style-name="P7" loext:marker-style-name="T18"><text:span text:style-name="T20">Kruskal </text:span><text:span text:style-name="T19">第一步要把圖裡所有 </text:span><text:span text:style-name="T20">E </text:span><text:span text:style-name="T19">條邊按權重由小到大排好。</text:span></text:p>
            <text:p text:style-name="P7" loext:marker-style-name="T18"><text:span text:style-name="T19">排序演算法（</text:span><text:span text:style-name="T20">Merge Sort / Heap Sort </text:span><text:span text:style-name="T19">等）的時間複雜度是 </text:span><text:span text:style-name="T20">O(n log n)</text:span><text:span text:style-name="T19">，</text:span></text:p>
            <text:p text:style-name="P7" loext:marker-style-name="T18"><text:span text:style-name="T19">這裡 </text:span><text:span text:style-name="T20">n </text:span><text:span text:style-name="T19">就是邊數 </text:span><text:span text:style-name="T20">E</text:span><text:span text:style-name="T19">，所以排序花費 </text:span><text:span text:style-name="T20">O(E log E)</text:span><text:span text:style-name="T19">。</text:span></text:p>
            <text:p text:style-name="P19" loext:marker-style-name="T18"/>
            <text:p text:style-name="P23" loext:marker-style-name="T61"><text:span text:style-name="T62">直覺理解：</text:span><text:span text:style-name="T63">E </text:span><text:span text:style-name="T62">條邊，每條邊在排序過程中平均被比較 </text:span><text:span text:style-name="T63">log E </text:span><text:span text:style-name="T62">次</text:span></text:p>
            <text:p text:style-name="P23" loext:marker-style-name="T61"><text:span text:style-name="T63">→ </text:span><text:span text:style-name="T62">共 </text:span><text:span text:style-name="T63">E × log E </text:span><text:span text:style-name="T62">次比較 → </text:span><text:span text:style-name="T63">O(E log E)</text:span><text:span text:style-name="T62">。</text:span></text:p>
          </table:table-cell>
        </table:table-row>
      </table:table>
      <text:p text:style-name="P5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6" loext:marker-style-name="T15"><text:span text:style-name="T17">【階段二】</text:span><text:span text:style-name="T16">Union-Find </text:span><text:span text:style-name="T17">處理每條邊 → </text:span><text:span text:style-name="T16">O(E α(V)) ≈ O(E)</text:span></text:p>
            <text:p text:style-name="P19" loext:marker-style-name="T18"/>
            <text:p text:style-name="P7" loext:marker-style-name="T18"><text:span text:style-name="T19">排序後逐條掃描，每條邊做一次 </text:span><text:span text:style-name="T20">Find + </text:span><text:span text:style-name="T19">可能一次 </text:span><text:span text:style-name="T20">Union</text:span><text:span text:style-name="T19">。</text:span></text:p>
            <text:p text:style-name="P19" loext:marker-style-name="T18"/>
            <text:p text:style-name="P6" loext:marker-style-name="T81"><text:span text:style-name="T83">Union-Find </text:span><text:span text:style-name="T82">的兩個關鍵優化：</text:span></text:p>
            <text:p text:style-name="P29" loext:marker-style-name="T91"><text:span text:style-name="T220">① </text:span><text:span text:style-name="T92">路徑壓縮（</text:span><text:span text:style-name="T220">Path Compression</text:span><text:span text:style-name="T92">）</text:span></text:p>
            <text:p text:style-name="P7" loext:marker-style-name="T18"><text:span text:style-name="T20">Find </text:span><text:span text:style-name="T19">時把沿途節點直接指向根，讓下次 </text:span><text:span text:style-name="T20">Find </text:span><text:span text:style-name="T19">更快。</text:span></text:p>
            <text:p text:style-name="P29" loext:marker-style-name="T91"><text:span text:style-name="T220">② </text:span><text:span text:style-name="T92">按 </text:span><text:span text:style-name="T220">Rank </text:span><text:span text:style-name="T92">合併（</text:span><text:span text:style-name="T220">Union by Rank</text:span><text:span text:style-name="T92">）</text:span></text:p>
            <text:p text:style-name="P7" loext:marker-style-name="T18"><text:span text:style-name="T20">Union </text:span><text:span text:style-name="T19">時把矮樹接到高樹下面，防止樹長太高。</text:span></text:p>
            <text:p text:style-name="P19" loext:marker-style-name="T18"/>
            <text:p text:style-name="P7" loext:marker-style-name="T18"><text:span text:style-name="T19">兩個優化合在一起，每次 </text:span><text:span text:style-name="T20">Find/Union </text:span><text:span text:style-name="T19">幾乎是 </text:span><text:span text:style-name="T20">O(1)——</text:span></text:p>
            <text:p text:style-name="P7" loext:marker-style-name="T18"><text:span text:style-name="T19">嚴格來說是 </text:span><text:span text:style-name="T20">O(α(V))</text:span><text:span text:style-name="T19">，</text:span><text:span text:style-name="T20">α </text:span><text:span text:style-name="T19">是反阿克曼函數，對所有實際情況 </text:span><text:span text:style-name="T20">α(V) ≤ 4</text:span><text:span text:style-name="T19">。</text:span></text:p>
            <text:p text:style-name="P15" loext:marker-style-name="T47"><text:span text:style-name="T48">→ E </text:span><text:span text:style-name="T49">條邊 </text:span><text:span text:style-name="T48">× O(α(V)) ≈ O(E)</text:span></text:p>
          </table:table-cell>
        </table:table-row>
      </table:table>
      <text:p text:style-name="P5"/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row table:style-name="表格47.1">
          <table:table-cell table:style-name="表格47.A1" office:value-type="string">
            <text:p text:style-name="P5" loext:marker-style-name="T160"><text:span text:style-name="T161">階段</text:span><text:span text:style-name="T160"/></text:p>
          </table:table-cell>
          <table:table-cell table:style-name="表格47.A1" office:value-type="string">
            <text:p text:style-name="P5" loext:marker-style-name="T160"><text:span text:style-name="T161">操作</text:span><text:span text:style-name="T160"/></text:p>
          </table:table-cell>
          <table:table-cell table:style-name="表格47.A1" office:value-type="string">
            <text:p text:style-name="P5" loext:marker-style-name="T160"><text:span text:style-name="T161">次數</text:span><text:span text:style-name="T160"/></text:p>
          </table:table-cell>
          <table:table-cell table:style-name="表格47.A1" office:value-type="string">
            <text:p text:style-name="P5" loext:marker-style-name="T160"><text:span text:style-name="T161">花費</text:span><text:span text:style-name="T160"/></text:p>
          </table:table-cell>
        </table:table-row>
        <table:table-row table:style-name="表格47.1">
          <table:table-cell table:style-name="表格47.A2" office:value-type="string">
            <text:p text:style-name="P7" loext:marker-style-name="T18"><text:span text:style-name="T20">① </text:span><text:span text:style-name="T19">排序所有邊</text:span></text:p>
          </table:table-cell>
          <table:table-cell table:style-name="表格47.A2" office:value-type="string">
            <text:p text:style-name="P7" loext:marker-style-name="T18"><text:span text:style-name="T19">排序 </text:span><text:span text:style-name="T20">E </text:span><text:span text:style-name="T19">條邊</text:span></text:p>
          </table:table-cell>
          <table:table-cell table:style-name="表格47.A2" office:value-type="string">
            <text:p text:style-name="P7" loext:marker-style-name="T18"><text:span text:style-name="T20">1 </text:span><text:span text:style-name="T19">次</text:span></text:p>
          </table:table-cell>
          <table:table-cell table:style-name="表格47.A2" office:value-type="string">
            <text:p text:style-name="P7" loext:marker-style-name="T18"><text:span text:style-name="T20">O(E log E)</text:span><text:span text:style-name="T18"/></text:p>
          </table:table-cell>
        </table:table-row>
        <table:table-row table:style-name="表格47.1">
          <table:table-cell table:style-name="表格47.A3" office:value-type="string">
            <text:p text:style-name="P7" loext:marker-style-name="T18"><text:span text:style-name="T20">② Find</text:span><text:span text:style-name="T19">（查代表人）</text:span></text:p>
          </table:table-cell>
          <table:table-cell table:style-name="表格47.A3" office:value-type="string">
            <text:p text:style-name="P7" loext:marker-style-name="T18"><text:span text:style-name="T19">每條邊 </text:span><text:span text:style-name="T20">2 </text:span><text:span text:style-name="T19">次</text:span></text:p>
          </table:table-cell>
          <table:table-cell table:style-name="表格47.A3" office:value-type="string">
            <text:p text:style-name="P7" loext:marker-style-name="T18"><text:span text:style-name="T19">共 </text:span><text:span text:style-name="T20">2E </text:span><text:span text:style-name="T19">次</text:span></text:p>
          </table:table-cell>
          <table:table-cell table:style-name="表格47.A3" office:value-type="string">
            <text:p text:style-name="P7" loext:marker-style-name="T18"><text:span text:style-name="T20">O(E α(V)) ≈ O(E)</text:span><text:span text:style-name="T18"/></text:p>
          </table:table-cell>
        </table:table-row>
        <text:soft-page-break/>
        <table:table-row table:style-name="表格47.1">
          <table:table-cell table:style-name="表格47.A2" office:value-type="string">
            <text:p text:style-name="P7" loext:marker-style-name="T18"><text:span text:style-name="T20">② Union</text:span><text:span text:style-name="T19">（合併集合）</text:span></text:p>
          </table:table-cell>
          <table:table-cell table:style-name="表格47.A2" office:value-type="string">
            <text:p text:style-name="P7" loext:marker-style-name="T18"><text:span text:style-name="T19">最多 </text:span><text:span text:style-name="T20">V-1 </text:span><text:span text:style-name="T19">次</text:span></text:p>
          </table:table-cell>
          <table:table-cell table:style-name="表格47.A2" office:value-type="string">
            <text:p text:style-name="P7" loext:marker-style-name="T18"><text:span text:style-name="T19">共 </text:span><text:span text:style-name="T20">V-1 </text:span><text:span text:style-name="T19">次</text:span></text:p>
          </table:table-cell>
          <table:table-cell table:style-name="表格47.A2" office:value-type="string">
            <text:p text:style-name="P7" loext:marker-style-name="T18"><text:span text:style-name="T20">O(V α(V)) ≈ O(V)</text:span><text:span text:style-name="T18"/></text:p>
          </table:table-cell>
        </table:table-row>
        <table:table-row table:style-name="表格47.1">
          <table:table-cell table:style-name="表格47.A5" office:value-type="string">
            <text:p text:style-name="P14" loext:marker-style-name="T69"><text:span text:style-name="T71">總計</text:span><text:span text:style-name="T69"/></text:p>
          </table:table-cell>
          <table:table-cell table:style-name="表格47.A5" office:value-type="string">
            <text:p text:style-name="P14" loext:marker-style-name="T69"><text:span text:style-name="T70">—</text:span><text:span text:style-name="T69"/></text:p>
          </table:table-cell>
          <table:table-cell table:style-name="表格47.A5" office:value-type="string">
            <text:p text:style-name="P14" loext:marker-style-name="T69"><text:span text:style-name="T70">—</text:span><text:span text:style-name="T69"/></text:p>
          </table:table-cell>
          <table:table-cell table:style-name="表格47.A5" office:value-type="string">
            <text:p text:style-name="P14" loext:marker-style-name="T69"><text:span text:style-name="T70">O(E log E) ← </text:span><text:span text:style-name="T71">排序主導</text:span></text:p>
          </table:table-cell>
        </table:table-row>
      </table:table>
      <text:p text:style-name="P5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14" loext:marker-style-name="T54"><text:span text:style-name="T55">為什麼總複雜度由排序主導？</text:span><text:span text:style-name="T54"/></text:p>
            <text:p text:style-name="P7" loext:marker-style-name="T18"><text:span text:style-name="T19">排序花費 </text:span><text:span text:style-name="T20">O(E log E)</text:span><text:span text:style-name="T19">，</text:span><text:span text:style-name="T20">Union-Find </text:span><text:span text:style-name="T19">花費約 </text:span><text:span text:style-name="T20">O(E)</text:span><text:span text:style-name="T19">。</text:span></text:p>
            <text:p text:style-name="P7" loext:marker-style-name="T18"><text:span text:style-name="T20">O(E log E) &gt;&gt; O(E)</text:span><text:span text:style-name="T19">，所以加起來還是 </text:span><text:span text:style-name="T20">O(E log E)</text:span><text:span text:style-name="T19">。</text:span></text:p>
            <text:p text:style-name="P19" loext:marker-style-name="T18"/>
            <text:p text:style-name="P23" loext:marker-style-name="T61"><text:span text:style-name="T62">類比：搬家打包花 </text:span><text:span text:style-name="T63">3 </text:span><text:span text:style-name="T62">小時，搬進去只花 </text:span><text:span text:style-name="T63">10 </text:span><text:span text:style-name="T62">分鐘 → 總時間還是 </text:span><text:span text:style-name="T63">3 </text:span><text:span text:style-name="T62">小時。</text:span></text:p>
            <text:p text:style-name="P38" loext:marker-style-name="T54"><text:span text:style-name="T56">→ </text:span><text:span text:style-name="T55">瓶頸（最慢的那段）決定總花費。</text:span></text:p>
          </table:table-cell>
        </table:table-row>
      </table:table>
      <text:p text:style-name="P5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14" loext:marker-style-name="T54"><text:span text:style-name="T56">O(E log E) </text:span><text:span text:style-name="T55">和 </text:span><text:span text:style-name="T56">O(E log V) </text:span><text:span text:style-name="T55">有差嗎？</text:span></text:p>
            <text:p text:style-name="P7" loext:marker-style-name="T18"><text:span text:style-name="T20">E ≤ V(V-1)/2 ≈ V²</text:span><text:span text:style-name="T19">，所以：</text:span></text:p>
            <text:p text:style-name="P29" loext:marker-style-name="T91"><text:span text:style-name="T220">log E ≤ log V² = 2 log V = O(log V)</text:span><text:span text:style-name="T91"/></text:p>
            <text:p text:style-name="P7" loext:marker-style-name="T18"><text:span text:style-name="T19">反過來 </text:span><text:span text:style-name="T20">E ≥ V-1</text:span><text:span text:style-name="T19">，所以 </text:span><text:span text:style-name="T20">log E ≥ log(V-1) ≈ log V</text:span><text:span text:style-name="T19">。</text:span></text:p>
            <text:p text:style-name="P7" loext:marker-style-name="T18"><text:span text:style-name="T20">→ log E </text:span><text:span text:style-name="T19">和 </text:span><text:span text:style-name="T20">log V </text:span><text:span text:style-name="T19">差一個常數倍，</text:span><text:span text:style-name="T20">Big-O </text:span><text:span text:style-name="T19">意義下相等：</text:span></text:p>
            <text:p text:style-name="P15" loext:marker-style-name="T47"><text:span text:style-name="T48">O(E log E) = O(E log V)</text:span><text:span text:style-name="T49">，兩種寫法都被接受。</text:span></text:p>
          </table:table-cell>
        </table:table-row>
      </table:table>
      <text:p text:style-name="P5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4" loext:marker-style-name="T69"><text:span text:style-name="T70">✅ </text:span><text:span text:style-name="T71">一句話記住 </text:span><text:span text:style-name="T70">Kruskal </text:span><text:span text:style-name="T71">複雜度</text:span></text:p>
            <text:p text:style-name="P7" loext:marker-style-name="T18"><text:span text:style-name="T20">Kruskal </text:span><text:span text:style-name="T19">的時間由「排序」決定，排 </text:span><text:span text:style-name="T20">E </text:span><text:span text:style-name="T19">條邊就花 </text:span><text:span text:style-name="T20">O(E log E)</text:span><text:span text:style-name="T19">，</text:span><text:span text:style-name="T20">Union-Find </text:span><text:span text:style-name="T19">幾乎免費。</text:span></text:p>
          </table:table-cell>
        </table:table-row>
      </table:table>
      <text:p text:style-name="P5"/>
      <text:p text:style-name="P7" loext:marker-style-name="T18"><draw:frame draw:style-name="fr2" draw:name="Complexity_Kruskal" text:anchor-type="as-char" svg:width="16cm" svg:height="12cm" draw:z-index="3"><draw:image xlink:href="Pictures/1000000000000550000003FCD632297D.png" xlink:type="simple" xlink:show="embed" xlink:actuate="onLoad" draw:mime-type="image/png"/></draw:frame></text:p>
      <text:p text:style-name="P19" loext:marker-style-name="T18"/>
      <text:p text:style-name="P46"/>
      <text:h text:style-name="P47" text:outline-level="2"><text:soft-page-break/>🎯 最後結論</text:h>
      <text:p text:style-name="P48"><text:span text:style-name="T221">Kruskal 的時間複雜度為 O(E log E)，也常寫成 O(E log V)，兩種寫法都正確，考試都接受。</text:span></text:p>
      <text:h text:style-name="P47" text:outline-level="2">Kruskal 到底做哪些事情？</text:h>
      <text:p text:style-name="P48"><text:span text:style-name="T221">整個 Kruskal 演算法只有兩件工作：</text:span></text:p>
      <text:p text:style-name="P48"><text:span text:style-name="T221">① 先把所有邊排序</text:span></text:p>
      <text:p text:style-name="P48"><text:span text:style-name="T221">② 一條一條檢查每條邊（Find → 必要時 Union）</text:span></text:p>
      <text:p text:style-name="P48"><text:span text:style-name="T221">因此，只要分別計算這兩件工作的時間，再加起來即可。</text:span></text:p>
      <text:h text:style-name="P47" text:outline-level="2">第一部分：排序所有邊</text:h>
      <text:p text:style-name="P48"><text:span text:style-name="T222">Step 1：共有多少條邊？</text:span></text:p>
      <text:p text:style-name="P48"><text:span text:style-name="T221">假設圖共有 E 條邊，例如：</text:span></text:p>
      <text:p text:style-name="P48"><text:span text:style-name="T221">AB、BC、CD、DE、EF ……</text:span></text:p>
      <text:p text:style-name="P48"><text:span text:style-name="T222">Step 2：Kruskal 要做什麼？</text:span></text:p>
      <text:p text:style-name="P48"><text:span text:style-name="T221">第一件事情就是把所有邊依照權重由小到大排序。</text:span></text:p>
      <text:p text:style-name="P48"><text:span text:style-name="T221">例如：</text:span></text:p>
      <text:p text:style-name="P48"><text:span text:style-name="T221">排序前： 5、2、9、1、7</text:span></text:p>
      <text:p text:style-name="P48"><text:span text:style-name="T221">排序後： 1、2、5、7、9</text:span></text:p>
      <text:p text:style-name="P48"><text:span text:style-name="T222">Step 3：排序需要多久？</text:span></text:p>
      <text:p text:style-name="P48"><text:span text:style-name="T221">高效率排序演算法（例如 Merge Sort、Heap Sort、Quick Sort 平均）</text:span></text:p>
      <text:p text:style-name="P48"><text:span text:style-name="T221">其時間複雜度都是 O(n log n)。</text:span></text:p>
      <text:p text:style-name="P48"><text:span text:style-name="T221">現在排序的是 E 條邊，因此：</text:span></text:p>
      <text:p text:style-name="P48"><text:span text:style-name="T221">n = E</text:span></text:p>
      <text:p text:style-name="P48"><text:span text:style-name="T221">所以：</text:span></text:p>
      <text:p text:style-name="P48"><text:span text:style-name="T221">排序時間 = O(E log E)</text:span></text:p>
      <table:table table:name="表格86" table:style-name="表格86">
        <table:table-column table:style-name="表格86.A" table:number-columns-repeated="2"/>
        <table:table-row table:style-name="表格86.1">
          <table:table-cell table:style-name="表格86.A1" office:value-type="string">
            <text:p text:style-name="P49">工作</text:p>
          </table:table-cell>
          <table:table-cell table:style-name="表格86.A1" office:value-type="string">
            <text:p text:style-name="P49">時間</text:p>
          </table:table-cell>
        </table:table-row>
        <table:table-row table:style-name="表格86.1">
          <table:table-cell table:style-name="表格86.A1" office:value-type="string">
            <text:p text:style-name="P49">排序 E 條邊</text:p>
          </table:table-cell>
          <table:table-cell table:style-name="表格86.A1" office:value-type="string">
            <text:p text:style-name="P49">O(E log E)</text:p>
          </table:table-cell>
        </table:table-row>
      </table:table>
      <text:h text:style-name="P47" text:outline-level="2">第二部分：逐條檢查所有邊</text:h>
      <text:p text:style-name="P48"><text:span text:style-name="T221">排序完成後，由小到大逐條檢查每條邊。</text:span></text:p>
      <text:p text:style-name="P48"><text:span text:style-name="T221">每拿一條邊，只做三件事情：</text:span></text:p>
      <text:p text:style-name="P48"><text:span text:style-name="T221">① Find(u)</text:span></text:p>
      <text:p text:style-name="P48"><text:span text:style-name="T221">② Find(v)</text:span></text:p>
      <text:p text:style-name="P48"><text:span text:style-name="T221">③ 若屬於不同集合，再做 Union(u,v)</text:span></text:p>
      <text:p text:style-name="P48"><text:span text:style-name="T222">如果 Union-Find 使用：</text:span></text:p>
      <text:p text:style-name="P48"><text:span text:style-name="T221">• Path Compression（路徑壓縮）</text:span></text:p>
      <text:p text:style-name="P48"><text:span text:style-name="T221">• Union by Rank（按 Rank 合併）</text:span></text:p>
      <text:p text:style-name="P48"><text:span text:style-name="T221">那麼 Find 與 Union 幾乎都可視為 O(1)。</text:span></text:p>
      <text:p text:style-name="P48"><text:span text:style-name="T221">（嚴格來說是 O(α(V))，但 α(V) 非常小，因此通常視為常數。）</text:span></text:p>
      <text:p text:style-name="P48"><text:span text:style-name="T221">共有 E 條邊，因此：</text:span></text:p>
      <text:p text:style-name="P48"><text:span text:style-name="T221">E × O(1) = O(E)</text:span></text:p>
      <table:table table:name="表格87" table:style-name="表格87">
        <table:table-column table:style-name="表格87.A" table:number-columns-repeated="2"/>
        <table:table-row table:style-name="表格87.1">
          <table:table-cell table:style-name="表格87.A1" office:value-type="string">
            <text:p text:style-name="P49">工作</text:p>
          </table:table-cell>
          <table:table-cell table:style-name="表格87.A1" office:value-type="string">
            <text:p text:style-name="P49">時間</text:p>
          </table:table-cell>
        </table:table-row>
        <table:table-row table:style-name="表格87.1">
          <table:table-cell table:style-name="表格87.A1" office:value-type="string">
            <text:p text:style-name="P49">逐條檢查 E 條邊</text:p>
          </table:table-cell>
          <table:table-cell table:style-name="表格87.A1" office:value-type="string">
            <text:p text:style-name="P49">O(E)</text:p>
          </table:table-cell>
        </table:table-row>
      </table:table>
      <text:h text:style-name="P47" text:outline-level="2">第三部分：全部加起來</text:h>
      <text:p text:style-name="P48"><text:span text:style-name="T221">排序：O(E log E)</text:span></text:p>
      <text:p text:style-name="P48"><text:span text:style-name="T221">Union-Find：O(E)</text:span></text:p>
      <text:p text:style-name="P48"><text:span text:style-name="T221">因此：</text:span></text:p>
      <text:p text:style-name="P48"><text:span text:style-name="T221">O(E log E) + O(E) = O(E log E)</text:span></text:p>
      <text:h text:style-name="P47" text:outline-level="2"><text:soft-page-break/>為什麼最後只剩 O(E log E)？</text:h>
      <text:p text:style-name="P48"><text:span text:style-name="T221">因為 O(E log E) 比 O(E) 大，因此整體時間由排序決定。</text:span></text:p>
      <text:p text:style-name="P48"><text:span text:style-name="T221">就像整理行李花 3 小時、搭電梯花 3 分鐘，總時間仍然約為 3 小時；真正花時間的是整理行李，而不是搭電梯。</text:span></text:p>
      <text:h text:style-name="P47" text:outline-level="2">為什麼 O(E log E) 又能寫成 O(E log V)？</text:h>
      <text:p text:style-name="P48"><text:span text:style-name="T221">圖最多只有 E ≈ V² 條邊，因此：</text:span></text:p>
      <text:p text:style-name="P48"><text:span text:style-name="T221">log E ≈ log(V²) = 2 log V</text:span></text:p>
      <text:p text:style-name="P48"><text:span text:style-name="T221">Big-O 不看常數，因此：</text:span></text:p>
      <text:p text:style-name="P48"><text:span text:style-name="T221">O(E log E) ≈ O(E log V)</text:span></text:p>
      <text:p text:style-name="P48"><text:span text:style-name="T221">兩種寫法代表的是相同的時間複雜度等級。</text:span></text:p>
      <text:h text:style-name="P47" text:outline-level="2">📌 考試速記</text:h>
      <table:table table:name="表格88" table:style-name="表格88">
        <table:table-column table:style-name="表格88.A" table:number-columns-repeated="2"/>
        <table:table-row table:style-name="表格88.1">
          <table:table-cell table:style-name="表格88.A1" office:value-type="string">
            <text:p text:style-name="P49">工作</text:p>
          </table:table-cell>
          <table:table-cell table:style-name="表格88.A1" office:value-type="string">
            <text:p text:style-name="P49">時間</text:p>
          </table:table-cell>
        </table:table-row>
        <table:table-row table:style-name="表格88.1">
          <table:table-cell table:style-name="表格88.A1" office:value-type="string">
            <text:p text:style-name="P49">排序所有邊</text:p>
          </table:table-cell>
          <table:table-cell table:style-name="表格88.A1" office:value-type="string">
            <text:p text:style-name="P49">O(E log E)</text:p>
          </table:table-cell>
        </table:table-row>
        <table:table-row table:style-name="表格88.1">
          <table:table-cell table:style-name="表格88.A1" office:value-type="string">
            <text:p text:style-name="P49">Union-Find 掃描所有邊</text:p>
          </table:table-cell>
          <table:table-cell table:style-name="表格88.A1" office:value-type="string">
            <text:p text:style-name="P49">O(E)</text:p>
          </table:table-cell>
        </table:table-row>
        <table:table-row table:style-name="表格88.1">
          <table:table-cell table:style-name="表格88.A1" office:value-type="string">
            <text:p text:style-name="P49">總時間</text:p>
          </table:table-cell>
          <table:table-cell table:style-name="表格88.A1" office:value-type="string">
            <text:p text:style-name="P49">O(E log E)</text:p>
          </table:table-cell>
        </table:table-row>
      </table:table>
      <text:p text:style-name="P50"><text:span text:style-name="T222">⭐ 一句話背起來：Kruskal 最花時間的是排序，因此時間複雜度為 O(E log E)；Union-Find 幾乎都是 O(1)，所以不會成為瓶頸。</text:span></text:p>
      <text:h text:style-name="P8" text:outline-level="1" loext:marker-style-name="T21"><text:span text:style-name="T22">五、</text:span><text:span text:style-name="T21">Sollin</text:span><text:span text:style-name="T22">（</text:span><text:span text:style-name="T21">Borůvka</text:span><text:span text:style-name="T22">）演算法 ── 大家同時搶最便宜的邊</text:span></text:h>
      <text:p text:style-name="P5"/>
      <text:h text:style-name="P9" text:outline-level="2" loext:marker-style-name="T23"><text:span text:style-name="T23">5-1 </text:span><text:span text:style-name="T24">核心概念（超新手版解釋）</text:span></text:h>
      <text:p text:style-name="P5"/>
      <text:p text:style-name="P11" loext:marker-style-name="T30"><text:span text:style-name="T31">學 </text:span><text:span text:style-name="T32">Sollin </text:span><text:span text:style-name="T31">之前，先把一個關鍵詞徹底搞懂，後面就會非常順 ── 那個詞叫 </text:span><text:span text:style-name="T32">Component</text:span><text:span text:style-name="T31">（連通組）。很多人第一次看到「</text:span><text:span text:style-name="T32">Component</text:span><text:span text:style-name="T31">」整個腦袋打結，其實它超簡單。</text:span></text:p>
      <text:p text:style-name="P5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4" loext:marker-style-name="T99"><text:span text:style-name="T99">Component（連通組）＝ 目前「已經連在一起」的一坨節點。</text:span><text:span text:style-name="T99"/></text:p>
            <text:p text:style-name="P45" loext:marker-style-name="T99"/>
            <text:p text:style-name="P44" loext:marker-style-name="T99"><text:span text:style-name="T99">一開始還沒選任何邊，所以每個節點</text:span><text:span text:style-name="T99"/></text:p>
            <text:p text:style-name="P44" loext:marker-style-name="T99"><text:span text:style-name="T99">自己就是一個 Component：</text:span><text:span text:style-name="T99"/></text:p>
            <text:p text:style-name="P45" loext:marker-style-name="T99"/>
            <text:p text:style-name="P44" loext:marker-style-name="T99"><text:span text:style-name="T99"><text:s text:c="5"/>(A) <text:s text:c="3"/>(B) <text:s text:c="3"/>(C) <text:s text:c="3"/>(D) <text:s text:c="3"/>(E)</text:span><text:span text:style-name="T99"/></text:p>
            <text:p text:style-name="P45" loext:marker-style-name="T99"/>
            <text:p text:style-name="P44" loext:marker-style-name="T99"><text:span text:style-name="T99"><text:s text:c="2"/>→ 這時候有 5 個 Component（5 坨）</text:span><text:span text:style-name="T99"/></text:p>
          </table:table-cell>
        </table:table-row>
      </table:table>
      <text:p text:style-name="P5"/>
      <text:p text:style-name="P11" loext:marker-style-name="T30"><text:span text:style-name="T32">Sollin </text:span><text:span text:style-name="T31">的玩法，就像很多個小部落（每個 </text:span><text:span text:style-name="T32">Component </text:span><text:span text:style-name="T31">是一個部落）。每一輪，所有部落「同時」公告：「我要接通離我最近、最便宜的那個鄰居！」然後大家一起合併。</text:span></text:p>
      <text:p text:style-name="P5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6" loext:marker-style-name="T25"><text:span text:style-name="T26">Sollin </text:span><text:span text:style-name="T27">的靈魂：每跑一輪，</text:span><text:span text:style-name="T26">Component </text:span><text:span text:style-name="T27">數量就變少</text:span></text:p>
            <text:p text:style-name="P7" loext:marker-style-name="T18"><text:span text:style-name="T20">① </text:span><text:span text:style-name="T19">一開始：</text:span><text:span text:style-name="T20">5 </text:span><text:span text:style-name="T19">個 </text:span><text:span text:style-name="T20">Component</text:span><text:span text:style-name="T19">（每個點各自一坨）。</text:span></text:p>
            <text:p text:style-name="P7" loext:marker-style-name="T18"><text:span text:style-name="T20">② </text:span><text:span text:style-name="T19">跑完第一輪、大家合併後：可能只剩 </text:span><text:span text:style-name="T20">2 </text:span><text:span text:style-name="T19">坨。</text:span></text:p>
            <text:p text:style-name="P7" loext:marker-style-name="T18"><text:span text:style-name="T20">③ </text:span><text:span text:style-name="T19">再跑一輪：剩 </text:span><text:span text:style-name="T20">1 </text:span><text:span text:style-name="T19">坨。</text:span></text:p>
            <text:p text:style-name="P7" loext:marker-style-name="T18"><text:span text:style-name="T19">當只剩 </text:span><text:span text:style-name="T20">1 </text:span><text:span text:style-name="T19">個 </text:span><text:span text:style-name="T20">Component</text:span><text:span text:style-name="T19">（全部連在一起）→ </text:span><text:span text:style-name="T20">MST </text:span><text:span text:style-name="T19">完成！</text:span></text:p>
            <text:p text:style-name="P7" loext:marker-style-name="T18"><text:span text:style-name="T19">重點不是「一直 </text:span><text:span text:style-name="T20">merge merge merge</text:span><text:span text:style-name="T19">」，而是盯著 </text:span><text:span text:style-name="T20">Component </text:span><text:span text:style-name="T19">的數量一路往下掉：</text:span><text:span text:style-name="T20">5 → 2 → 1</text:span><text:span text:style-name="T19">。</text:span></text:p>
          </table:table-cell>
        </table:table-row>
      </table:table>
      <text:p text:style-name="P5"/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6" loext:marker-style-name="T25"><text:span text:style-name="T26">Sollin </text:span><text:span text:style-name="T27">執行步驟（只有</text:span><text:span text:style-name="T26">4</text:span><text:span text:style-name="T27">步）：</text:span></text:p>
            <text:p text:style-name="P7" loext:marker-style-name="T18"><text:span text:style-name="T20">① </text:span><text:span text:style-name="T19">初始：每個節點自成一個 </text:span><text:span text:style-name="T20">Component</text:span><text:span text:style-name="T19">（一個小圓圈）。</text:span></text:p>
            <text:p text:style-name="P7" loext:marker-style-name="T18"><text:span text:style-name="T20">② </text:span><text:span text:style-name="T19">同一輪：每個 </text:span><text:span text:style-name="T20">Component </text:span><text:span text:style-name="T19">掃描自己能連出去的所有邊，找出「最便宜的外連邊」。</text:span></text:p>
            <text:p text:style-name="P7" loext:marker-style-name="T18"><text:span text:style-name="T20">③ </text:span><text:span text:style-name="T19">把所有被選中的邊一起加入 </text:span><text:span text:style-name="T20">MST</text:span><text:span text:style-name="T19">（若兩個 </text:span><text:span text:style-name="T20">Component </text:span><text:span text:style-name="T19">互選同一條邊，只算一次）。</text:span></text:p>
            <text:p text:style-name="P7" loext:marker-style-name="T18"><text:span text:style-name="T20">④ </text:span><text:span text:style-name="T19">合併後重新算 </text:span><text:span text:style-name="T20">Component</text:span><text:span text:style-name="T19">，重複步驟②③，直到只剩一個 </text:span><text:span text:style-name="T20">Component</text:span><text:span text:style-name="T19">。</text:span></text:p>
            <text:p text:style-name="P7" loext:marker-style-name="T18"><text:span text:style-name="T19">別名：</text:span><text:span text:style-name="T20">Sollin </text:span><text:span text:style-name="T19">和 </text:span><text:span text:style-name="T20">Borůvka </text:span><text:span text:style-name="T19">是同一個演算法，兩個名字都可能出現在考試！</text:span></text:p>
          </table:table-cell>
        </table:table-row>
      </table:table>
      <text:p text:style-name="P5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4" loext:marker-style-name="T54"><text:span text:style-name="T56">🔑 </text:span><text:span text:style-name="T55">一句話本質</text:span></text:p>
            <text:p text:style-name="P7" loext:marker-style-name="T18"><text:span text:style-name="T20">Sollin</text:span><text:span text:style-name="T19">：每個 </text:span><text:span text:style-name="T20">Component </text:span><text:span text:style-name="T19">同時找自己最便宜的外連邊，全部一起合併。每跑一輪，</text:span><text:span text:style-name="T20">Component </text:span><text:span text:style-name="T19">數量至少減半。</text:span></text:p>
          </table:table-cell>
        </table:table-row>
      </table:table>
      <text:p text:style-name="P5"/>
      <text:h text:style-name="P9" text:outline-level="2" loext:marker-style-name="T23"><text:span text:style-name="T23">5-2 </text:span><text:span text:style-name="T24">完整圖解範例（盯著 </text:span><text:span text:style-name="T23">Component </text:span><text:span text:style-name="T24">數量一路變少）</text:span></text:h>
      <text:p text:style-name="P5"/>
      <text:p text:style-name="P11" loext:marker-style-name="T30"><text:span text:style-name="T31">我們用 </text:span><text:span text:style-name="T32">5 </text:span><text:span text:style-name="T31">個節點 </text:span><text:span text:style-name="T32">A, B, C, D, E </text:span><text:span text:style-name="T31">跑一次。請特別盯著一個數字：「現在還有幾個 </text:span><text:span text:style-name="T32">Component</text:span><text:span text:style-name="T31">」。</text:span></text:p>
      <text:p text:style-name="P11" loext:marker-style-name="T30"><text:span text:style-name="T31">各節點最短外連邊：</text:span><text:span text:style-name="T32">A→(A,D)=14</text:span><text:span text:style-name="T31">、</text:span><text:span text:style-name="T32">B→(B,C)=15</text:span><text:span text:style-name="T31">、</text:span><text:span text:style-name="T32">C→(C,D)=13</text:span><text:span text:style-name="T31">、</text:span><text:span text:style-name="T32">D→(D,E)=12</text:span><text:span text:style-name="T31">、</text:span><text:span text:style-name="T32">E→(D,E)=12</text:span><text:span text:style-name="T31">（</text:span><text:span text:style-name="T32">D </text:span><text:span text:style-name="T31">和 </text:span><text:span text:style-name="T32">E </text:span><text:span text:style-name="T31">都選同一條 </text:span><text:span text:style-name="T32">D─E</text:span><text:span text:style-name="T31">）。</text:span></text:p>
      <text:p text:style-name="P5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44" loext:marker-style-name="T99"><text:span text:style-name="T99">第 0 步（開始）：每個點各自一坨</text:span><text:span text:style-name="T99"/></text:p>
            <text:p text:style-name="P45" loext:marker-style-name="T99"><text:soft-page-break/></text:p>
            <text:p text:style-name="P44" loext:marker-style-name="T99"><text:span text:style-name="T99"><text:s text:c="3"/>{A} <text:s text:c="2"/>{B} <text:s text:c="2"/>{C} <text:s text:c="2"/>{D} <text:s text:c="2"/>{E}</text:span><text:span text:style-name="T99"/></text:p>
            <text:p text:style-name="P45" loext:marker-style-name="T99"/>
            <text:p text:style-name="P44" loext:marker-style-name="T99"><text:span text:style-name="T99"><text:s text:c="2"/>→ 共 5 個 Component</text:span><text:span text:style-name="T99"/></text:p>
          </table:table-cell>
        </table:table-row>
      </table:table>
      <text:p text:style-name="P5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4" loext:marker-style-name="T81"><text:span text:style-name="T83">Step 1</text:span><text:span text:style-name="T82">：第一輪 ── 每個 </text:span><text:span text:style-name="T83">Component </text:span><text:span text:style-name="T82">同時找自己最便宜的外連邊</text:span></text:p>
            <text:p text:style-name="P32" loext:marker-style-name="T99"><text:span text:style-name="T99">{A} 最便宜外連邊 = (A,D)=14 <text:s text:c="2"/>→ 提名 A─D</text:span><text:span text:style-name="T99"/></text:p>
            <text:p text:style-name="P32" loext:marker-style-name="T99"><text:span text:style-name="T99">{B} 最便宜外連邊 = (B,C)=15 <text:s text:c="2"/>→ 提名 B─C</text:span><text:span text:style-name="T99"/></text:p>
            <text:p text:style-name="P32" loext:marker-style-name="T99"><text:span text:style-name="T99">{C} 最便宜外連邊 = (C,D)=13 <text:s text:c="2"/>→ 提名 C─D</text:span><text:span text:style-name="T99"/></text:p>
            <text:p text:style-name="P32" loext:marker-style-name="T99"><text:span text:style-name="T99">{D} 最便宜外連邊 = (D,E)=12 <text:s text:c="2"/>→ 提名 D─E</text:span><text:span text:style-name="T99"/></text:p>
            <text:p text:style-name="P32" loext:marker-style-name="T99"><text:span text:style-name="T99">{E} 最便宜外連邊 = (D,E)=12 <text:s text:c="2"/>→ 提名 D─E（和 D 同一條，只算一次）</text:span><text:span text:style-name="T99"/></text:p>
            <text:p text:style-name="P51" loext:marker-style-name="T99"/>
            <text:p text:style-name="P32" loext:marker-style-name="T99"><text:span text:style-name="T99">本輪收下的邊：A─D=14, B─C=15, C─D=13, D─E=12</text:span><text:span text:style-name="T99"/></text:p>
          </table:table-cell>
        </table:table-row>
        <table:table-row table:style-name="表格56.1">
          <table:table-cell table:style-name="表格56.A2" office:value-type="string">
            <text:p text:style-name="P44" loext:marker-style-name="T99"><text:span text:style-name="T99">把上面提名的邊全部接上去，看 Component 怎麼併：</text:span><text:span text:style-name="T99"/></text:p>
            <text:p text:style-name="P45" loext:marker-style-name="T99"/>
            <text:p text:style-name="P44" loext:marker-style-name="T99"><text:span text:style-name="T99">合併前： {A} {B} {C} {D} {E} <text:s text:c="7"/>← 5 個</text:span><text:span text:style-name="T99"/></text:p>
            <text:p text:style-name="P44" loext:marker-style-name="T99"><text:span text:style-name="T99"><text:s text:c="3"/>A─D、D─E 把 A、D、E 串成一坨 → {A,D,E}</text:span><text:span text:style-name="T99"/></text:p>
            <text:p text:style-name="P44" loext:marker-style-name="T99"><text:span text:style-name="T99"><text:s text:c="3"/>C─D 把 C 接進來 → {A,C,D,E}</text:span><text:span text:style-name="T99"/></text:p>
            <text:p text:style-name="P44" loext:marker-style-name="T99"><text:span text:style-name="T99"><text:s text:c="3"/>B─C 把 B 接進來 → {A,B,C,D,E}</text:span><text:span text:style-name="T99"/></text:p>
            <text:p text:style-name="P44" loext:marker-style-name="T99"><text:span text:style-name="T99">合併後： {A,B,C,D,E} <text:s text:c="14"/>← 1 個</text:span><text:span text:style-name="T99"/></text:p>
            <text:p text:style-name="P45" loext:marker-style-name="T99"/>
            <text:p text:style-name="P44" loext:marker-style-name="T99"><text:span text:style-name="T99"><text:s text:c="2"/>→ Component 數量：5 → 1</text:span><text:span text:style-name="T99"/></text:p>
          </table:table-cell>
        </table:table-row>
        <table:table-row table:style-name="表格56.1">
          <table:table-cell table:style-name="表格56.A3" office:value-type="string">
            <text:p text:style-name="P24" loext:marker-style-name="T47"><text:span text:style-name="T48">✅ </text:span><text:span text:style-name="T49">一輪就連成一個 </text:span><text:span text:style-name="T48">Component</text:span><text:span text:style-name="T49">！</text:span></text:p>
            <text:p text:style-name="P16" loext:marker-style-name="T18"><text:span text:style-name="T20">MST </text:span><text:span text:style-name="T19">邊集合：</text:span><text:span text:style-name="T20">A─D=14, B─C=15, C─D=13, D─E=12</text:span></text:p>
            <text:p text:style-name="P16" loext:marker-style-name="T66"><text:span text:style-name="T67">總權重：</text:span><text:span text:style-name="T68">14 + 15 + 13 + 12 = 54</text:span></text:p>
            <text:p text:style-name="P40" loext:marker-style-name="T18"><text:span text:style-name="T19">邊數驗證：</text:span><text:span text:style-name="T20">V-1 = 5-1 = 4 </text:span><text:span text:style-name="T19">條 ✅</text:span></text:p>
          </table:table-cell>
        </table:table-row>
      </table:table>
      <text:p text:style-name="P5"/>
      <text:p text:style-name="P11" loext:marker-style-name="T30"><text:span text:style-name="T31">這個例子剛好一輪就結束了。但如果節點更多、邊更分散，常常要跑好幾輪 ── 下一節就用一個需要「兩輪」的例子，讓你親眼看到 </text:span><text:span text:style-name="T32">Component </text:span><text:span text:style-name="T31">從 </text:span><text:span text:style-name="T32">4 → 2 → 1 </text:span><text:span text:style-name="T31">慢慢減少。</text:span></text:p>
      <text:p text:style-name="P5"/>
      <text:h text:style-name="P9" text:outline-level="2"><text:span text:style-name="T23">5-3 </text:span><text:span text:style-name="T24">需要兩輪的範例</text:span></text:h>
      <text:p text:style-name="P5"/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44" loext:marker-style-name="T99"><text:span text:style-name="T99">範例圖：A─1─B，B─4─C，C─2─D，A─5─D</text:span><text:span text:style-name="T99"/></text:p>
            <text:p text:style-name="P44" loext:marker-style-name="T99"><text:span text:style-name="T99">初始 Component：{A} <text:s/>{B} <text:s/>{C} <text:s/>{D}</text:span><text:span text:style-name="T99"/></text:p>
            <text:p text:style-name="P44"/>
            <text:p text:style-name="P44" loext:marker-style-name="T99"><text:span text:style-name="T99">───── 第一輪 ──────────────────────────────────────────</text:span><text:span text:style-name="T99"/></text:p>
            <text:p text:style-name="P44" loext:marker-style-name="T99"><text:span text:style-name="T99">{A}：最短外連邊 = A─B=1 <text:s/>→ 提名 A─B</text:span><text:span text:style-name="T99"/></text:p>
            <text:p text:style-name="P44" loext:marker-style-name="T99"><text:span text:style-name="T99">{B}：最短外連邊 = A─B=1 <text:s/>→ 提名 A─B（同一條）</text:span><text:span text:style-name="T99"/></text:p>
            <text:p text:style-name="P44" loext:marker-style-name="T99"><text:span text:style-name="T99">{C}：最短外連邊 = C─D=2 <text:s/>→ 提名 C─D</text:span><text:span text:style-name="T99"/></text:p>
            <text:p text:style-name="P44" loext:marker-style-name="T99"><text:span text:style-name="T99">{D}：最短外連邊 = C─D=2 <text:s/>→ 提名 C─D（同一條）</text:span><text:span text:style-name="T99"/></text:p>
            <text:p text:style-name="P44" loext:marker-style-name="T99"><text:span text:style-name="T99">加入：A─B=1, C─D=2</text:span><text:span text:style-name="T99"/></text:p>
            <text:p text:style-name="P44" loext:marker-style-name="T99"><text:span text:style-name="T99">合併後 Component：{A,B} <text:s/>{C,D}</text:span><text:span text:style-name="T99"/></text:p>
            <text:p text:style-name="P44"/>
            <text:p text:style-name="P44" loext:marker-style-name="T99"><text:span text:style-name="T99">───── 第二輪 ──────────────────────────────────────────</text:span><text:span text:style-name="T99"/></text:p>
            <text:p text:style-name="P44" loext:marker-style-name="T99"><text:span text:style-name="T99">{A,B}：最短外連邊 = B─C=4 <text:s/>→ 提名 B─C</text:span><text:span text:style-name="T99"/></text:p>
            <text:p text:style-name="P44" loext:marker-style-name="T99"><text:span text:style-name="T99">{C,D}：最短外連邊 = B─C=4 <text:s/>→ 提名 B─C（同一條）</text:span><text:span text:style-name="T99"/></text:p>
            <text:p text:style-name="P44" loext:marker-style-name="T99"><text:span text:style-name="T99">加入：B─C=4</text:span><text:span text:style-name="T99"/></text:p>
            <text:p text:style-name="P44" loext:marker-style-name="T99"><text:span text:style-name="T99">合併後 Component：{A,B,C,D} <text:s/>← 只剩一個！完成！</text:span><text:span text:style-name="T99"/></text:p>
            <text:p text:style-name="P44"/>
            <text:p text:style-name="P44" loext:marker-style-name="T99"><text:span text:style-name="T99">MST = A─B=1, C─D=2, B─C=4 <text:s text:c="4"/>總重 = 7</text:span><text:span text:style-name="T99"/></text:p>
          </table:table-cell>
        </table:table-row>
      </table:table>
      <text:p text:style-name="P5"/>
      <text:h text:style-name="P9" text:outline-level="2" loext:marker-style-name="T23"><text:span text:style-name="T23">5-4 Sollin </text:span><text:span text:style-name="T24">演算法（虛擬碼 </text:span><text:span text:style-name="T23">Pseudocode</text:span><text:span text:style-name="T24">）</text:span></text:h>
      <text:p text:style-name="P5"/>
      <text:p text:style-name="P11" loext:marker-style-name="T30"><text:soft-page-break/><text:span text:style-name="T32">Sollin </text:span><text:span text:style-name="T31">的虛擬碼，比 </text:span><text:span text:style-name="T32">Prim</text:span><text:span text:style-name="T31">、</text:span><text:span text:style-name="T32">Kruskal </text:span><text:span text:style-name="T31">多包了一層「一輪一輪」的外圈：每一輪，所有 </text:span><text:span text:style-name="T32">Component </text:span><text:span text:style-name="T31">同時挑自己最便宜的外連邊，然後一起合併。</text:span><text:span text:style-name="T32">FIND / UNION </text:span><text:span text:style-name="T31">直接沿用上一章 </text:span><text:span text:style-name="T32">Kruskal </text:span><text:span text:style-name="T31">的 </text:span><text:span text:style-name="T32">Union-Find</text:span><text:span text:style-name="T31">。</text:span></text:p>
      <text:p text:style-name="P5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42" loext:marker-style-name="T156"><text:span text:style-name="T156">// Sollin</text:span><text:span text:style-name="T157">（</text:span><text:span text:style-name="T156">Borůvka</text:span><text:span text:style-name="T157">）主演算法</text:span></text:p>
            <text:p text:style-name="P42" loext:marker-style-name="T158"><text:span text:style-name="T158">SOLLIN(V, E):</text:span><text:span text:style-name="T158"/></text:p>
            <text:p text:style-name="P42" loext:marker-style-name="T158"><text:span text:style-name="T158"><text:s text:c="4"/>for each </text:span><text:span text:style-name="T159">節點 </text:span><text:span text:style-name="T158">v in V:</text:span></text:p>
            <text:p text:style-name="P42" loext:marker-style-name="T158"><text:span text:style-name="T158"><text:s text:c="8"/>MAKE-SET(v) <text:s text:c="17"/>// </text:span><text:span text:style-name="T159">每個點 </text:span><text:span text:style-name="T158">= </text:span><text:span text:style-name="T159">一個 </text:span><text:span text:style-name="T158">Component</text:span></text:p>
            <text:p text:style-name="P42" loext:marker-style-name="T158"><text:span text:style-name="T158"><text:s text:c="4"/>MST <text:s text:c="2"/>← { }</text:span><text:span text:style-name="T158"/></text:p>
            <text:p text:style-name="P42" loext:marker-style-name="T158"><text:span text:style-name="T158"><text:s text:c="4"/>total ← 0</text:span><text:span text:style-name="T158"/></text:p>
            <text:p text:style-name="P43" loext:marker-style-name="T158"/>
            <text:p text:style-name="P42" loext:marker-style-name="T158"><text:span text:style-name="T158"><text:s text:c="4"/>while Component </text:span><text:span text:style-name="T159">數量 </text:span><text:span text:style-name="T158">&gt; 1: <text:s text:c="8"/>// </text:span><text:span text:style-name="T159">還沒併成一坨就繼續</text:span></text:p>
            <text:p text:style-name="P42" loext:marker-style-name="T158"><text:span text:style-name="T158"><text:s text:c="8"/>cheapest[</text:span><text:span text:style-name="T159">每個 </text:span><text:span text:style-name="T158">Component] ← </text:span><text:span text:style-name="T159">無 <text:s/></text:span><text:span text:style-name="T158">// </text:span><text:span text:style-name="T159">本輪各坨的最便宜外連邊</text:span></text:p>
            <text:p text:style-name="P43" loext:marker-style-name="T158"/>
            <text:p text:style-name="P42" loext:marker-style-name="T158"><text:span text:style-name="T158"><text:s text:c="8"/>// ① </text:span><text:span text:style-name="T159">所有 </text:span><text:span text:style-name="T158">Component </text:span><text:span text:style-name="T159">同時找最便宜外連邊</text:span></text:p>
            <text:p text:style-name="P42" loext:marker-style-name="T158"><text:span text:style-name="T158"><text:s text:c="8"/>for each </text:span><text:span text:style-name="T159">邊 </text:span><text:span text:style-name="T158">(u, v, w) in E:</text:span></text:p>
            <text:p text:style-name="P42" loext:marker-style-name="T158"><text:span text:style-name="T158"><text:s text:c="12"/>cu ← FIND(u); <text:s/>cv ← FIND(v)</text:span><text:span text:style-name="T158"/></text:p>
            <text:p text:style-name="P42" loext:marker-style-name="T158"><text:span text:style-name="T158"><text:s text:c="12"/>if cu = cv: continue <text:s text:c="5"/>// </text:span><text:span text:style-name="T159">同一坨，不是外連邊</text:span></text:p>
            <text:p text:style-name="P42" loext:marker-style-name="T158"><text:span text:style-name="T158"><text:s text:c="12"/>if w &lt; cheapest[cu].w: cheapest[cu] ← (u, v, w)</text:span><text:span text:style-name="T158"/></text:p>
            <text:p text:style-name="P42" loext:marker-style-name="T158"><text:span text:style-name="T158"><text:s text:c="12"/>if w &lt; cheapest[cv].w: cheapest[cv] ← (u, v, w)</text:span><text:span text:style-name="T158"/></text:p>
            <text:p text:style-name="P43" loext:marker-style-name="T158"/>
            <text:p text:style-name="P42" loext:marker-style-name="T158"><text:span text:style-name="T158"><text:s text:c="8"/>// ② </text:span><text:span text:style-name="T159">把每坨選到的邊一起收下、一起合併</text:span></text:p>
            <text:p text:style-name="P42" loext:marker-style-name="T158"><text:span text:style-name="T158"><text:s text:c="8"/>merged ← false</text:span><text:span text:style-name="T158"/></text:p>
            <text:p text:style-name="P42" loext:marker-style-name="T158"><text:span text:style-name="T158"><text:s text:c="8"/>for each Component c:</text:span><text:span text:style-name="T158"/></text:p>
            <text:p text:style-name="P42" loext:marker-style-name="T158"><text:span text:style-name="T158"><text:s text:c="12"/>if cheapest[c] </text:span><text:span text:style-name="T159">存在</text:span><text:span text:style-name="T158">:</text:span></text:p>
            <text:p text:style-name="P42" loext:marker-style-name="T158"><text:span text:style-name="T158"><text:s text:c="16"/>(u, v, w) ← cheapest[c]</text:span><text:span text:style-name="T158"/></text:p>
            <text:p text:style-name="P42" loext:marker-style-name="T158"><text:span text:style-name="T158"><text:s text:c="16"/>if FIND(u) ≠ FIND(v): // </text:span><text:span text:style-name="T159">避免同一條被兩坨重複收</text:span></text:p>
            <text:p text:style-name="P42" loext:marker-style-name="T158"><text:span text:style-name="T158"><text:s text:c="20"/></text:span><text:span text:style-name="T159">將 </text:span><text:span text:style-name="T158">(u, v) </text:span><text:span text:style-name="T159">加入 </text:span><text:span text:style-name="T158">MST</text:span></text:p>
            <text:p text:style-name="P42" loext:marker-style-name="T158"><text:span text:style-name="T158"><text:s text:c="20"/>total ← total + w</text:span><text:span text:style-name="T158"/></text:p>
            <text:p text:style-name="P42" loext:marker-style-name="T158"><text:span text:style-name="T158"><text:s text:c="20"/>UNION(u, v)</text:span><text:span text:style-name="T158"/></text:p>
            <text:p text:style-name="P42" loext:marker-style-name="T158"><text:span text:style-name="T158"><text:s text:c="20"/>merged ← true</text:span><text:span text:style-name="T158"/></text:p>
            <text:p text:style-name="P43" loext:marker-style-name="T158"/>
            <text:p text:style-name="P42" loext:marker-style-name="T158"><text:span text:style-name="T158"><text:s text:c="8"/>if merged = false: break <text:s text:c="5"/>// </text:span><text:span text:style-name="T159">圖不連通，提前結束</text:span></text:p>
            <text:p text:style-name="P43" loext:marker-style-name="T158"/>
            <text:p text:style-name="P42" loext:marker-style-name="T158"><text:span text:style-name="T158"><text:s text:c="4"/>return MST, total</text:span><text:span text:style-name="T158"/></text:p>
          </table:table-cell>
        </table:table-row>
      </table:table>
      <text:p text:style-name="P5"/>
      <table:table table:name="表格59" table:style-name="表格59">
        <table:table-column table:style-name="表格59.A"/>
        <table:table-row table:style-name="表格59.1">
          <table:table-cell table:style-name="表格59.A1" office:value-type="string">
            <text:p text:style-name="P14" loext:marker-style-name="T54"><text:span text:style-name="T55">為什麼外圈最多只跑 </text:span><text:span text:style-name="T56">log V </text:span><text:span text:style-name="T55">輪？</text:span></text:p>
            <text:p text:style-name="P7" loext:marker-style-name="T18"><text:span text:style-name="T19">每一輪，每個 </text:span><text:span text:style-name="T20">Component </text:span><text:span text:style-name="T19">至少會和另一個 </text:span><text:span text:style-name="T20">Component </text:span><text:span text:style-name="T19">合併，所以 </text:span><text:span text:style-name="T20">Component </text:span><text:span text:style-name="T19">數量每輪至少砍一半：</text:span><text:span text:style-name="T20">V → V/2 → V/4 → … → 1</text:span><text:span text:style-name="T19">。</text:span></text:p>
            <text:p text:style-name="P7" loext:marker-style-name="T18"><text:span text:style-name="T19">砍一半最多砍 </text:span><text:span text:style-name="T20">log₂V </text:span><text:span text:style-name="T19">次，因此外圈最多跑 </text:span><text:span text:style-name="T20">log V </text:span><text:span text:style-name="T19">輪 ── 這正是 </text:span><text:span text:style-name="T20">Sollin </text:span><text:span text:style-name="T19">時間複雜度 </text:span><text:span text:style-name="T20">O(E log V) </text:span><text:span text:style-name="T19">的由來（下一節詳推）。</text:span></text:p>
          </table:table-cell>
        </table:table-row>
      </table:table>
      <text:p text:style-name="P5"/>
      <text:h text:style-name="P9" text:outline-level="2" loext:marker-style-name="T23"><text:span text:style-name="T23">5-5 </text:span><text:span text:style-name="T24">為什麼 </text:span><text:span text:style-name="T23">Sollin </text:span><text:span text:style-name="T24">適合分散式計算？</text:span></text:h>
      <text:p text:style-name="P5"/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44" loext:marker-style-name="T99"><text:span text:style-name="T99">Prim（必須一個中央節點主控）： <text:s text:c="3"/>Sollin（每台電腦各自計算）：</text:span><text:span text:style-name="T99"/></text:p>
            <text:p text:style-name="P44" loext:marker-style-name="T99"><text:span text:style-name="T99">中央節點 A <text:s text:c="24"/>電腦1 <text:s text:c="2"/>電腦2 <text:s text:c="2"/>電腦3 <text:s text:c="2"/>電腦4</text:span><text:span text:style-name="T99"/></text:p>
            <text:p text:style-name="P44" loext:marker-style-name="T99"><text:span text:style-name="T99"><text:s text:c="3"/>│ <text:s text:c="32"/>↓ <text:s text:c="6"/>↓ <text:s text:c="6"/>↓ <text:s text:c="6"/>↓</text:span><text:span text:style-name="T99"/></text:p>
            <text:p text:style-name="P44" loext:marker-style-name="T99"><text:span text:style-name="T99">一步步往外 <text:s text:c="23"/>各自找自己最短外連邊（同時進行！）</text:span><text:span text:style-name="T99"/></text:p>
            <text:p text:style-name="P44" loext:marker-style-name="T99"><text:span text:style-name="T99">只有一個節點在工作 <text:s text:c="18"/>↓ <text:s text:c="6"/>↓ <text:s text:c="6"/>↓ <text:s text:c="6"/>↓</text:span><text:span text:style-name="T99"/></text:p>
            <text:p text:style-name="P44" loext:marker-style-name="T99"><text:span text:style-name="T99">→ 無法平行化 <text:s text:c="22"/>統一回報 → 同時合併</text:span><text:span text:style-name="T99"/></text:p>
            <text:p text:style-name="P44"/>
            <text:p text:style-name="P44" loext:marker-style-name="T99"><text:span text:style-name="T99">Sollin 每輪所有 Component 同時計算，不需要一個中央控制點，</text:span><text:span text:style-name="T99"/></text:p>
            <text:p text:style-name="P44" loext:marker-style-name="T99"><text:span text:style-name="T99">因此特別適合 Google Maps 路網計算、超大規模網路拓樸分析。</text:span><text:span text:style-name="T99"/></text:p>
          </table:table-cell>
        </table:table-row>
      </table:table>
      <text:p text:style-name="P5"/>
      <text:p text:style-name="Standard"/>
      <text:h text:style-name="P9" text:outline-level="2" loext:marker-style-name="T23"><text:soft-page-break/><text:span text:style-name="T23">5-6 Sollin </text:span><text:span text:style-name="T24">時間複雜度 ── 逐步推導</text:span></text:h>
      <text:p text:style-name="P5"/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6" loext:marker-style-name="T25"><text:span text:style-name="T27">結論：</text:span><text:span text:style-name="T26">Sollin </text:span><text:span text:style-name="T27">時間複雜度 </text:span><text:span text:style-name="T26">= O(E log V)</text:span></text:p>
            <text:p text:style-name="P7" loext:marker-style-name="T18"><text:span text:style-name="T19">核心關鍵：每一輪把 </text:span><text:span text:style-name="T20">Component </text:span><text:span text:style-name="T19">數量至少減半，所以最多只跑 </text:span><text:span text:style-name="T20">log V </text:span><text:span text:style-name="T19">輪。</text:span></text:p>
          </table:table-cell>
        </table:table-row>
      </table:table>
      <text:p text:style-name="P5"/>
      <table:table table:name="表格62" table:style-name="表格62">
        <table:table-column table:style-name="表格62.A"/>
        <table:table-row table:style-name="表格62.1">
          <table:table-cell table:style-name="表格62.A1" office:value-type="string">
            <text:p text:style-name="P6" loext:marker-style-name="T15"><text:span text:style-name="T17">【關鍵觀察一】每輪 </text:span><text:span text:style-name="T16">Component </text:span><text:span text:style-name="T17">數量至少減半</text:span></text:p>
            <text:p text:style-name="P19" loext:marker-style-name="T18"/>
            <text:p text:style-name="P7" loext:marker-style-name="T18"><text:span text:style-name="T19">初始：</text:span><text:span text:style-name="T20">V </text:span><text:span text:style-name="T19">個 </text:span><text:span text:style-name="T20">Component</text:span><text:span text:style-name="T19">（每個節點自成一組）。</text:span></text:p>
            <text:p text:style-name="P7" loext:marker-style-name="T18"><text:span text:style-name="T19">每個 </text:span><text:span text:style-name="T20">Component </text:span><text:span text:style-name="T19">都找一條最短外連邊，並與另一個 </text:span><text:span text:style-name="T20">Component </text:span><text:span text:style-name="T19">合併。</text:span></text:p>
            <text:p text:style-name="P19" loext:marker-style-name="T18"/>
            <text:p text:style-name="P6" loext:marker-style-name="T81"><text:span text:style-name="T82">最壞情況：每次剛好兩兩配對合併：</text:span><text:span text:style-name="T81"/></text:p>
            <text:p text:style-name="P7" loext:marker-style-name="T18"><text:span text:style-name="T19">輪次 </text:span><text:span text:style-name="T20">0</text:span><text:span text:style-name="T19">：</text:span><text:span text:style-name="T20">V </text:span><text:span text:style-name="T19">個 </text:span><text:span text:style-name="T20">Component</text:span><text:span text:style-name="T19">（例如 </text:span><text:span text:style-name="T20">V = 8</text:span><text:span text:style-name="T19">）</text:span></text:p>
            <text:p text:style-name="P7" loext:marker-style-name="T18"><text:span text:style-name="T19">輪次 </text:span><text:span text:style-name="T20">1</text:span><text:span text:style-name="T19">：最多剩 </text:span><text:span text:style-name="T20">V/2 </text:span><text:span text:style-name="T19">個（例如 </text:span><text:span text:style-name="T20">4 </text:span><text:span text:style-name="T19">個）</text:span></text:p>
            <text:p text:style-name="P7" loext:marker-style-name="T18"><text:span text:style-name="T19">輪次 </text:span><text:span text:style-name="T20">2</text:span><text:span text:style-name="T19">：最多剩 </text:span><text:span text:style-name="T20">V/4 </text:span><text:span text:style-name="T19">個（例如 </text:span><text:span text:style-name="T20">2 </text:span><text:span text:style-name="T19">個）</text:span></text:p>
            <text:p text:style-name="P15" loext:marker-style-name="T47"><text:span text:style-name="T49">輪次 </text:span><text:span text:style-name="T48">3</text:span><text:span text:style-name="T49">：最多剩 </text:span><text:span text:style-name="T48">V/8 </text:span><text:span text:style-name="T49">個（例如 </text:span><text:span text:style-name="T48">1 </text:span><text:span text:style-name="T49">個）← 完成！</text:span></text:p>
            <text:p text:style-name="P19" loext:marker-style-name="T18"/>
            <text:p text:style-name="P38" loext:marker-style-name="T54"><text:span text:style-name="T56">→ </text:span><text:span text:style-name="T55">最多只需要 ⌈</text:span><text:span text:style-name="T56">log₂ V⌉ </text:span><text:span text:style-name="T55">輪就能全部合併完。</text:span></text:p>
          </table:table-cell>
        </table:table-row>
      </table:table>
      <text:p text:style-name="P5"/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office:value-type="string">
            <text:p text:style-name="P5" loext:marker-style-name="T160"><text:span text:style-name="T161">輪次</text:span><text:span text:style-name="T160"/></text:p>
          </table:table-cell>
          <table:table-cell table:style-name="表格63.A1" office:value-type="string">
            <text:p text:style-name="P5" loext:marker-style-name="T160"><text:span text:style-name="T223">Component </text:span><text:span text:style-name="T161">數量（上界）</text:span></text:p>
          </table:table-cell>
          <table:table-cell table:style-name="表格63.A1" office:value-type="string">
            <text:p text:style-name="P5" loext:marker-style-name="T160"><text:span text:style-name="T161">本輪操作</text:span><text:span text:style-name="T160"/></text:p>
          </table:table-cell>
          <table:table-cell table:style-name="表格63.A1" office:value-type="string">
            <text:p text:style-name="P5" loext:marker-style-name="T160"><text:span text:style-name="T161">本輪花費</text:span><text:span text:style-name="T160"/></text:p>
          </table:table-cell>
        </table:table-row>
        <table:table-row table:style-name="表格63.1">
          <table:table-cell table:style-name="表格63.A2" office:value-type="string">
            <text:p text:style-name="P7" loext:marker-style-name="T18"><text:span text:style-name="T19">第 </text:span><text:span text:style-name="T20">1 </text:span><text:span text:style-name="T19">輪</text:span></text:p>
          </table:table-cell>
          <table:table-cell table:style-name="表格63.A2" office:value-type="string">
            <text:p text:style-name="P7" loext:marker-style-name="T18"><text:span text:style-name="T20">V → ≤ V/2</text:span><text:span text:style-name="T18"/></text:p>
          </table:table-cell>
          <table:table-cell table:style-name="表格63.A2" office:value-type="string">
            <text:p text:style-name="P7" loext:marker-style-name="T18"><text:span text:style-name="T19">掃所有 </text:span><text:span text:style-name="T20">E </text:span><text:span text:style-name="T19">條邊</text:span></text:p>
          </table:table-cell>
          <table:table-cell table:style-name="表格63.A2" office:value-type="string">
            <text:p text:style-name="P7" loext:marker-style-name="T18"><text:span text:style-name="T20">O(E)</text:span><text:span text:style-name="T18"/></text:p>
          </table:table-cell>
        </table:table-row>
        <table:table-row table:style-name="表格63.1">
          <table:table-cell table:style-name="表格63.A3" office:value-type="string">
            <text:p text:style-name="P7" loext:marker-style-name="T18"><text:span text:style-name="T19">第 </text:span><text:span text:style-name="T20">2 </text:span><text:span text:style-name="T19">輪</text:span></text:p>
          </table:table-cell>
          <table:table-cell table:style-name="表格63.A3" office:value-type="string">
            <text:p text:style-name="P7" loext:marker-style-name="T18"><text:span text:style-name="T20">≤ V/2 → ≤ V/4</text:span><text:span text:style-name="T18"/></text:p>
          </table:table-cell>
          <table:table-cell table:style-name="表格63.A3" office:value-type="string">
            <text:p text:style-name="P7" loext:marker-style-name="T18"><text:span text:style-name="T19">掃所有 </text:span><text:span text:style-name="T20">E </text:span><text:span text:style-name="T19">條邊</text:span></text:p>
          </table:table-cell>
          <table:table-cell table:style-name="表格63.A3" office:value-type="string">
            <text:p text:style-name="P7" loext:marker-style-name="T18"><text:span text:style-name="T20">O(E)</text:span><text:span text:style-name="T18"/></text:p>
          </table:table-cell>
        </table:table-row>
        <table:table-row table:style-name="表格63.1">
          <table:table-cell table:style-name="表格63.A2" office:value-type="string">
            <text:p text:style-name="P7" loext:marker-style-name="T18"><text:span text:style-name="T19">第 </text:span><text:span text:style-name="T20">k </text:span><text:span text:style-name="T19">輪</text:span></text:p>
          </table:table-cell>
          <table:table-cell table:style-name="表格63.A2" office:value-type="string">
            <text:p text:style-name="P7" loext:marker-style-name="T18"><text:span text:style-name="T20">≤ V/2^(k-1)</text:span><text:span text:style-name="T18"/></text:p>
          </table:table-cell>
          <table:table-cell table:style-name="表格63.A2" office:value-type="string">
            <text:p text:style-name="P7" loext:marker-style-name="T18"><text:span text:style-name="T19">掃所有 </text:span><text:span text:style-name="T20">E </text:span><text:span text:style-name="T19">條邊</text:span></text:p>
          </table:table-cell>
          <table:table-cell table:style-name="表格63.A2" office:value-type="string">
            <text:p text:style-name="P7" loext:marker-style-name="T18"><text:span text:style-name="T20">O(E)</text:span><text:span text:style-name="T18"/></text:p>
          </table:table-cell>
        </table:table-row>
        <table:table-row table:style-name="表格63.1">
          <table:table-cell table:style-name="表格63.A3" office:value-type="string">
            <text:p text:style-name="P7" loext:marker-style-name="T18"><text:span text:style-name="T19">共幾輪？</text:span><text:span text:style-name="T18"/></text:p>
          </table:table-cell>
          <table:table-cell table:style-name="表格63.A3" office:value-type="string">
            <text:p text:style-name="P7" loext:marker-style-name="T18"><text:span text:style-name="T19">最多 </text:span><text:span text:style-name="T20">log V </text:span><text:span text:style-name="T19">輪</text:span></text:p>
          </table:table-cell>
          <table:table-cell table:style-name="表格63.A3" office:value-type="string">
            <text:p text:style-name="P7" loext:marker-style-name="T18"><text:span text:style-name="T20">—</text:span><text:span text:style-name="T18"/></text:p>
          </table:table-cell>
          <table:table-cell table:style-name="表格63.A3" office:value-type="string">
            <text:p text:style-name="P7" loext:marker-style-name="T18"><text:span text:style-name="T20">—</text:span><text:span text:style-name="T18"/></text:p>
          </table:table-cell>
        </table:table-row>
        <table:table-row table:style-name="表格63.1">
          <table:table-cell table:style-name="表格63.A6" office:value-type="string">
            <text:p text:style-name="P14" loext:marker-style-name="T69"><text:span text:style-name="T71">總計</text:span><text:span text:style-name="T69"/></text:p>
          </table:table-cell>
          <table:table-cell table:style-name="表格63.A6" office:value-type="string">
            <text:p text:style-name="P14" loext:marker-style-name="T69"><text:span text:style-name="T70">—</text:span><text:span text:style-name="T69"/></text:p>
          </table:table-cell>
          <table:table-cell table:style-name="表格63.A6" office:value-type="string">
            <text:p text:style-name="P14" loext:marker-style-name="T69"><text:span text:style-name="T70">—</text:span><text:span text:style-name="T69"/></text:p>
          </table:table-cell>
          <table:table-cell table:style-name="表格63.A6" office:value-type="string">
            <text:p text:style-name="P14" loext:marker-style-name="T69"><text:span text:style-name="T70">log V </text:span><text:span text:style-name="T71">輪 </text:span><text:span text:style-name="T70">× O(E) = O(E log V)</text:span></text:p>
          </table:table-cell>
        </table:table-row>
      </table:table>
      <text:p text:style-name="P5"/>
      <table:table table:name="表格64" table:style-name="表格64">
        <table:table-column table:style-name="表格64.A"/>
        <table:table-row table:style-name="表格64.1">
          <table:table-cell table:style-name="表格64.A1" office:value-type="string">
            <text:p text:style-name="P6" loext:marker-style-name="T15"><text:span text:style-name="T17">【關鍵觀察二】每一輪做什麼？花多少時間？</text:span><text:span text:style-name="T15"/></text:p>
            <text:p text:style-name="P19" loext:marker-style-name="T18"/>
            <text:p text:style-name="P7" loext:marker-style-name="T18"><text:span text:style-name="T19">每一輪，所有 </text:span><text:span text:style-name="T20">Component </text:span><text:span text:style-name="T19">同時找自己的最短外連邊，然後合併。</text:span></text:p>
            <text:p text:style-name="P19" loext:marker-style-name="T18"/>
            <text:p text:style-name="P6" loext:marker-style-name="T81"><text:span text:style-name="T82">一輪裡的操作：</text:span><text:span text:style-name="T81"/></text:p>
            <text:p text:style-name="P7" loext:marker-style-name="T18"><text:span text:style-name="T20">① </text:span><text:span text:style-name="T19">掃描所有 </text:span><text:span text:style-name="T20">E </text:span><text:span text:style-name="T19">條邊，替每個 </text:span><text:span text:style-name="T20">Component </text:span><text:span text:style-name="T19">找最短外連邊 → </text:span><text:span text:style-name="T20">O(E)</text:span></text:p>
            <text:p text:style-name="P7" loext:marker-style-name="T18"><text:span text:style-name="T20">② </text:span><text:span text:style-name="T19">把選出的邊加入 </text:span><text:span text:style-name="T20">MST</text:span><text:span text:style-name="T19">，合併 </text:span><text:span text:style-name="T20">Component</text:span><text:span text:style-name="T19">（</text:span><text:span text:style-name="T20">Union-Find</text:span><text:span text:style-name="T19">） → </text:span><text:span text:style-name="T20">O(V α(V)) ≈ O(V)</text:span></text:p>
            <text:p text:style-name="P7" loext:marker-style-name="T18"><text:span text:style-name="T20">③ </text:span><text:span text:style-name="T19">因為連通圖必有 </text:span><text:span text:style-name="T20">E ≥ V−1</text:span><text:span text:style-name="T19">，而通常 </text:span><text:span text:style-name="T20">E ≥ V</text:span><text:span text:style-name="T19">（鏈狀圖例外），</text:span><text:span text:style-name="T20">O(E) </text:span><text:span text:style-name="T19">主導 → 每輪花費 </text:span><text:span text:style-name="T20">O(E)</text:span></text:p>
            <text:p text:style-name="P19" loext:marker-style-name="T18"/>
            <text:p text:style-name="P15" loext:marker-style-name="T47"><text:span text:style-name="T48">→ </text:span><text:span text:style-name="T49">每輪 </text:span><text:span text:style-name="T48">O(E)</text:span><text:span text:style-name="T49">，共最多 </text:span><text:span text:style-name="T48">log V </text:span><text:span text:style-name="T49">輪 → 總計 </text:span><text:span text:style-name="T48">O(E log V)</text:span></text:p>
          </table:table-cell>
        </table:table-row>
      </table:table>
      <text:p text:style-name="P5"/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4" loext:marker-style-name="T54"><text:span text:style-name="T55">用數字感受一下（</text:span><text:span text:style-name="T56">V = 1024 </text:span><text:span text:style-name="T55">的圖）：</text:span></text:p>
            <text:p text:style-name="P19" loext:marker-style-name="T18"/>
            <text:p text:style-name="P7" loext:marker-style-name="T18"><text:span text:style-name="T19">初始： </text:span><text:span text:style-name="T20">1024 </text:span><text:span text:style-name="T19">個 </text:span><text:span text:style-name="T20">Component</text:span></text:p>
            <text:p text:style-name="P7" loext:marker-style-name="T18"><text:span text:style-name="T19">第 </text:span><text:span text:style-name="T20">1 </text:span><text:span text:style-name="T19">輪：最多 </text:span><text:span text:style-name="T20">512 </text:span><text:span text:style-name="T19">個</text:span></text:p>
            <text:p text:style-name="P7" loext:marker-style-name="T18"><text:span text:style-name="T19">第 </text:span><text:span text:style-name="T20">2 </text:span><text:span text:style-name="T19">輪：最多 </text:span><text:span text:style-name="T20">256 </text:span><text:span text:style-name="T19">個</text:span></text:p>
            <text:p text:style-name="P23" loext:marker-style-name="T61"><text:span text:style-name="T63">......</text:span><text:span text:style-name="T61"/></text:p>
            <text:p text:style-name="P15" loext:marker-style-name="T47"><text:soft-page-break/><text:span text:style-name="T49">第 </text:span><text:span text:style-name="T48">10 </text:span><text:span text:style-name="T49">輪：最多 </text:span><text:span text:style-name="T48">1 </text:span><text:span text:style-name="T49">個 → 完成！</text:span></text:p>
            <text:p text:style-name="P19" loext:marker-style-name="T18"/>
            <text:p text:style-name="P7" loext:marker-style-name="T18"><text:span text:style-name="T20">log₂(1024) = 10</text:span><text:span text:style-name="T19">，所以最多只需要 </text:span><text:span text:style-name="T20">10 </text:span><text:span text:style-name="T19">輪。</text:span></text:p>
            <text:p text:style-name="P38" loext:marker-style-name="T54"><text:span text:style-name="T55">每輪掃所有 </text:span><text:span text:style-name="T56">E </text:span><text:span text:style-name="T55">條邊 → 總計 </text:span><text:span text:style-name="T56">10 × E = O(E log V) </text:span><text:span text:style-name="T55">次操作。</text:span></text:p>
          </table:table-cell>
        </table:table-row>
      </table:table>
      <text:p text:style-name="P5"/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6" loext:marker-style-name="T15"><text:span text:style-name="T17">與 </text:span><text:span text:style-name="T16">Kruskal</text:span><text:span text:style-name="T17">、</text:span><text:span text:style-name="T16">Prim </text:span><text:span text:style-name="T17">的複雜度比較</text:span></text:p>
            <text:p text:style-name="P19" loext:marker-style-name="T18"/>
            <text:p text:style-name="P7" loext:marker-style-name="T18"><text:span text:style-name="T20">Sollin O(E log V) vs Kruskal O(E log E) = O(E log V) → </text:span><text:span text:style-name="T19">相同！</text:span></text:p>
            <text:p text:style-name="P7" loext:marker-style-name="T18"><text:span text:style-name="T20">Sollin O(E log V) vs Prim Heap </text:span><text:span text:style-name="T19">版 </text:span><text:span text:style-name="T20">O(E log V) → </text:span><text:span text:style-name="T19">相同！</text:span></text:p>
            <text:p text:style-name="P19" loext:marker-style-name="T18"/>
            <text:p text:style-name="P6" loext:marker-style-name="T81"><text:span text:style-name="T82">那 </text:span><text:span text:style-name="T83">Sollin </text:span><text:span text:style-name="T82">的優勢是什麼？</text:span></text:p>
            <text:p text:style-name="P7" loext:marker-style-name="T18"><text:span text:style-name="T19">每一輪的操作是「所有 </text:span><text:span text:style-name="T20">Component </text:span><text:span text:style-name="T19">同時進行」，天然適合平行化。</text:span></text:p>
            <text:p text:style-name="P7" loext:marker-style-name="T18"><text:span text:style-name="T20">Prim </text:span><text:span text:style-name="T19">和 </text:span><text:span text:style-name="T20">Kruskal </text:span><text:span text:style-name="T19">是序列演算法（一步一步），難以平行化。</text:span></text:p>
            <text:p text:style-name="P15" loext:marker-style-name="T47"><text:span text:style-name="T48">→ </text:span><text:span text:style-name="T49">分散式環境下，</text:span><text:span text:style-name="T48">Sollin </text:span><text:span text:style-name="T49">每輪可分給多台電腦同時跑，</text:span></text:p>
            <text:p text:style-name="P15" loext:marker-style-name="T47"><text:span text:style-name="T49">大幅降低實際牆鐘時間（</text:span><text:span text:style-name="T48">Wall-clock time</text:span><text:span text:style-name="T49">）。</text:span></text:p>
          </table:table-cell>
        </table:table-row>
      </table:table>
      <text:p text:style-name="P5"/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14" loext:marker-style-name="T69"><text:span text:style-name="T70">✅ </text:span><text:span text:style-name="T71">一句話記住 </text:span><text:span text:style-name="T70">Sollin </text:span><text:span text:style-name="T71">複雜度</text:span></text:p>
            <text:p text:style-name="P7" loext:marker-style-name="T18"><text:span text:style-name="T19">每輪掃全部 </text:span><text:span text:style-name="T20">E </text:span><text:span text:style-name="T19">條邊 </text:span><text:span text:style-name="T20">O(E)</text:span><text:span text:style-name="T19">，最多跑 </text:span><text:span text:style-name="T20">log V </text:span><text:span text:style-name="T19">輪（每輪 </text:span><text:span text:style-name="T20">Component </text:span><text:span text:style-name="T19">至少減半）→ </text:span><text:span text:style-name="T20">O(E log V)</text:span><text:span text:style-name="T19">。</text:span></text:p>
          </table:table-cell>
        </table:table-row>
      </table:table>
      <text:p text:style-name="P5"/>
      <text:p text:style-name="P7" loext:marker-style-name="T18"><draw:frame draw:style-name="fr2" draw:name="Complexity_Sollin" text:anchor-type="as-char" svg:width="16cm" svg:height="11.529cm" draw:z-index="4"><draw:image xlink:href="Pictures/1000000000000550000003D4BE568724.png" xlink:type="simple" xlink:show="embed" xlink:actuate="onLoad" draw:mime-type="image/png"/></draw:frame></text:p>
      <text:p text:style-name="P19" loext:marker-style-name="T18"/>
      <text:h text:style-name="P8" text:outline-level="1" loext:marker-style-name="T21"><text:span text:style-name="T22">六、</text:span><text:span text:style-name="T21">113</text:span><text:span text:style-name="T22">閩 </text:span><text:span text:style-name="T21">Q5 ── Kruskal </text:span><text:span text:style-name="T22">公職真題完整解題</text:span></text:h>
      <text:p text:style-name="P5"/>
      <text:h text:style-name="P9" text:outline-level="2" loext:marker-style-name="T23"><text:span text:style-name="T23">6-1 </text:span><text:span text:style-name="T24">題目</text:span></text:h>
      <text:p text:style-name="P5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44" loext:marker-style-name="T224"><text:span text:style-name="T224">題目：</text:span><text:span text:style-name="T224"/></text:p>
            <text:p text:style-name="P44" loext:marker-style-name="T224"><text:span text:style-name="T224">圖 G 有 7 個節點：a, b, c, d, e, f, g</text:span><text:span text:style-name="T224"/></text:p>
            <text:p text:style-name="P44" loext:marker-style-name="T224"><text:span text:style-name="T224">所有邊（格式：節點─節點 = 權重）：</text:span><text:span text:style-name="T224"/></text:p>
            <text:p text:style-name="P44" loext:marker-style-name="T224"><text:span text:style-name="T224">a─b=13　　a─c=9　　a─d=10　　b─d=16　　c─d=12</text:span><text:span text:style-name="T224"/></text:p>
            <text:p text:style-name="P44" loext:marker-style-name="T224"><text:span text:style-name="T224">c─e=2　　　c─f=3　　　d─g=18　　　e─f=4　　　f─g=6</text:span><text:span text:style-name="T224"/></text:p>
            <text:p text:style-name="P44"/>
            <text:p text:style-name="P44" loext:marker-style-name="T224"><text:span text:style-name="T224">請用 Kruskal 演算法找出 MST 及總權重。</text:span><text:span text:style-name="T224"/></text:p>
          </table:table-cell>
        </table:table-row>
      </table:table>
      <text:p text:style-name="P5"/>
      <text:h text:style-name="P9" text:outline-level="2" loext:marker-style-name="T23"><text:span text:style-name="T23">6-2 </text:span><text:span text:style-name="T24">先畫出圖的結構</text:span></text:h>
      <text:p text:style-name="P5"/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44" loext:marker-style-name="T99"><text:span text:style-name="T99">圖的連線示意（看懂這張圖，解題就簡單了）：</text:span><text:span text:style-name="T99"/></text:p>
            <text:p text:style-name="P44" loext:marker-style-name="T99"><text:span text:style-name="T99"><text:s text:c="13"/>b</text:span><text:span text:style-name="T99"/></text:p>
            <text:p text:style-name="P44" loext:marker-style-name="T99"><text:span text:style-name="T99"><text:s text:c="12"/>/ \</text:span><text:span text:style-name="T99"/></text:p>
            <text:p text:style-name="P44" loext:marker-style-name="T99"><text:span text:style-name="T99"><text:s text:c="10"/>13 <text:s text:c="2"/>16</text:span><text:span text:style-name="T99"/></text:p>
            <text:p text:style-name="P44" loext:marker-style-name="T99"><text:span text:style-name="T99"><text:s text:c="10"/>/ <text:s text:c="4"/>\</text:span><text:span text:style-name="T99"/></text:p>
            <text:p text:style-name="P44" loext:marker-style-name="T99"><text:span text:style-name="T99"><text:s text:c="9"/>a──10───d──18──g</text:span><text:span text:style-name="T99"/></text:p>
            <text:p text:style-name="P44" loext:marker-style-name="T99"><text:span text:style-name="T99"><text:s text:c="10"/>\ <text:s text:c="5"/>│ <text:s text:c="6"/>\</text:span><text:span text:style-name="T99"/></text:p>
            <text:p text:style-name="P44" loext:marker-style-name="T99"><text:span text:style-name="T99"><text:s text:c="11"/>9 <text:s text:c="3"/>12 <text:s text:c="7"/>6</text:span><text:span text:style-name="T99"/></text:p>
            <text:p text:style-name="P44" loext:marker-style-name="T99"><text:span text:style-name="T99"><text:s text:c="12"/>\ <text:s text:c="3"/>│ <text:s text:c="8"/>\</text:span><text:span text:style-name="T99"/></text:p>
            <text:p text:style-name="P44" loext:marker-style-name="T99"><text:span text:style-name="T99"><text:s text:c="13"/>c──3──f────6───+</text:span><text:span text:style-name="T99"/></text:p>
            <text:p text:style-name="P44" loext:marker-style-name="T99"><text:span text:style-name="T99"><text:s text:c="13"/>│ <text:s text:c="5"/>│</text:span><text:span text:style-name="T99"/></text:p>
            <text:p text:style-name="P44" loext:marker-style-name="T99"><text:span text:style-name="T99"><text:s text:c="13"/>2 <text:s text:c="5"/>4</text:span><text:span text:style-name="T99"/></text:p>
            <text:p text:style-name="P44" loext:marker-style-name="T99"><text:span text:style-name="T99"><text:s text:c="13"/>│ <text:s text:c="5"/>│</text:span><text:span text:style-name="T99"/></text:p>
            <text:p text:style-name="P44" loext:marker-style-name="T99"><text:span text:style-name="T99"><text:s text:c="13"/>e──────+</text:span><text:span text:style-name="T99"/></text:p>
            <text:p text:style-name="P44"/>
            <text:p text:style-name="P44" loext:marker-style-name="T99"><text:span text:style-name="T99">(c─e=2, e─f=4, c─f=3)</text:span><text:span text:style-name="T99"/></text:p>
            <text:p text:style-name="P44" loext:marker-style-name="T99"><text:span text:style-name="T99">注意：c 連著好幾條邊！c─e=2, c─f=3, c─d=12, a─c=9</text:span><text:span text:style-name="T99"/></text:p>
            <text:p text:style-name="P44" loext:marker-style-name="T99"><text:span text:style-name="T99"><text:s text:c="6"/>這些是解題時最容易混淆的地方，要特別注意。</text:span><text:span text:style-name="T99"/></text:p>
          </table:table-cell>
        </table:table-row>
      </table:table>
      <text:p text:style-name="P5"/>
      <text:h text:style-name="P9" text:outline-level="2" loext:marker-style-name="T23"><text:span text:style-name="T23">6-3 Step 1</text:span><text:span text:style-name="T24">：所有邊排序</text:span></text:h>
      <text:p text:style-name="P5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44" loext:marker-style-name="T99"><text:span text:style-name="T99">10條邊，依權重由小到大排序：</text:span><text:span text:style-name="T99"/></text:p>
            <text:p text:style-name="P44"/>
            <text:p text:style-name="P44" loext:marker-style-name="T99"><text:span text:style-name="T99">排序 <text:s/>邊 <text:s text:c="10"/>權重 <text:s text:c="3"/>說明</text:span><text:span text:style-name="T99"/></text:p>
            <text:p text:style-name="P44" loext:marker-style-name="T99"><text:span text:style-name="T99">────────────────────────────────────────</text:span><text:span text:style-name="T99"/></text:p>
            <text:p text:style-name="P44" loext:marker-style-name="T99"><text:span text:style-name="T99"><text:s text:c="2"/>1 <text:s text:c="2"/>(c, e) <text:s text:c="8"/>2 <text:s text:c="3"/>← c 和 e 直接連，最便宜</text:span><text:span text:style-name="T99"/></text:p>
            <text:p text:style-name="P44" loext:marker-style-name="T99"><text:span text:style-name="T99"><text:s text:c="2"/>2 <text:s text:c="2"/>(c, f) <text:s text:c="8"/>3 <text:s text:c="3"/>← c 和 f 直接連</text:span><text:span text:style-name="T99"/></text:p>
            <text:p text:style-name="P44" loext:marker-style-name="T99"><text:span text:style-name="T99"><text:s text:c="2"/>3 <text:s text:c="2"/>(e, f) <text:s text:c="8"/>4 <text:s text:c="3"/>← e 和 f 直接連</text:span><text:span text:style-name="T99"/></text:p>
            <text:p text:style-name="P44" loext:marker-style-name="T99"><text:span text:style-name="T99"><text:s text:c="2"/>4 <text:s text:c="2"/>(f, g) <text:s text:c="8"/>6 <text:s text:c="3"/>← f 和 g 直接連</text:span><text:span text:style-name="T99"/></text:p>
            <text:p text:style-name="P44" loext:marker-style-name="T99"><text:span text:style-name="T99"><text:s text:c="2"/>5 <text:s text:c="2"/>(a, c) <text:s text:c="8"/>9 <text:s text:c="3"/>← a 和 c 直接連</text:span><text:span text:style-name="T99"/></text:p>
            <text:p text:style-name="P44" loext:marker-style-name="T99"><text:span text:style-name="T99"><text:s text:c="2"/>6 <text:s text:c="2"/>(a, d) <text:s text:c="7"/>10 <text:s text:c="3"/>← a 和 d 直接連</text:span><text:span text:style-name="T99"/></text:p>
            <text:p text:style-name="P44" loext:marker-style-name="T99"><text:span text:style-name="T99"><text:s text:c="2"/>7 <text:s text:c="2"/>(c, d) <text:s text:c="7"/>12 <text:s text:c="3"/>← c 和 d 直接連</text:span><text:span text:style-name="T99"/></text:p>
            <text:p text:style-name="P44" loext:marker-style-name="T99"><text:span text:style-name="T99"><text:s text:c="2"/>8 <text:s text:c="2"/>(a, b) <text:s text:c="7"/>13 <text:s text:c="3"/>← a 和 b 直接連</text:span><text:span text:style-name="T99"/></text:p>
            <text:p text:style-name="P44" loext:marker-style-name="T99"><text:span text:style-name="T99"><text:s text:c="2"/>9 <text:s text:c="2"/>(b, d) <text:s text:c="7"/>16</text:span><text:span text:style-name="T99"/></text:p>
            <text:p text:style-name="P44" loext:marker-style-name="T99"><text:span text:style-name="T99"><text:s/>10 <text:s text:c="2"/>(d, g) <text:s text:c="7"/>18 <text:s text:c="3"/>← 最貴</text:span><text:span text:style-name="T99"/></text:p>
          </table:table-cell>
        </table:table-row>
      </table:table>
      <text:p text:style-name="P5"/>
      <text:h text:style-name="P9" text:outline-level="2"><text:soft-page-break/><text:span text:style-name="T23">6-4 Step 2</text:span><text:span text:style-name="T24">：逐條執行 </text:span><text:span text:style-name="T23">Kruskal</text:span></text:h>
      <text:p text:style-name="P5"/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24" loext:marker-style-name="T81"><text:span text:style-name="T83">Step 1</text:span><text:span text:style-name="T82">：加入 </text:span><text:span text:style-name="T83">(c,e)=2</text:span></text:p>
            <text:p text:style-name="P32" loext:marker-style-name="T99"><text:span text:style-name="T99">Find(c)=c <text:s text:c="3"/>Find(e)=e <text:s text:c="3"/>← 不同集合，可以加！</text:span><text:span text:style-name="T99"/></text:p>
            <text:p text:style-name="P32" loext:marker-style-name="T99"><text:span text:style-name="T99">Union(c, e)</text:span><text:span text:style-name="T99"/></text:p>
            <text:p text:style-name="P32" loext:marker-style-name="T99"><text:span text:style-name="T99">集合狀態：{a} {b} {c,e} {d} {f} {g}</text:span><text:span text:style-name="T99"/></text:p>
            <text:p text:style-name="P32" loext:marker-style-name="T99"><text:span text:style-name="T99">已選邊（1條）：(c,e)=2</text:span><text:span text:style-name="T99"/></text:p>
            <text:p text:style-name="P32" loext:marker-style-name="T99"><text:span text:style-name="T99">目前 MST： <text:s/>c──2──e</text:span><text:span text:style-name="T99"/></text:p>
          </table:table-cell>
        </table:table-row>
      </table:table>
      <text:p text:style-name="P5"/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24" loext:marker-style-name="T81"><text:span text:style-name="T83">Step 2</text:span><text:span text:style-name="T82">：加入 </text:span><text:span text:style-name="T83">(c,f)=3</text:span></text:p>
            <text:p text:style-name="P32" loext:marker-style-name="T99"><text:span text:style-name="T99">Find(c)=c <text:s text:c="3"/>Find(f)=f <text:s text:c="3"/>← 不同集合，可以加！</text:span><text:span text:style-name="T99"/></text:p>
            <text:p text:style-name="P32" loext:marker-style-name="T99"><text:span text:style-name="T99">Union(c, f)</text:span><text:span text:style-name="T99"/></text:p>
            <text:p text:style-name="P32" loext:marker-style-name="T99"><text:span text:style-name="T99">集合狀態：{a} {b} {c,e,f} {d} {g}</text:span><text:span text:style-name="T99"/></text:p>
            <text:p text:style-name="P32" loext:marker-style-name="T99"><text:span text:style-name="T99">已選邊（2條）：(c,e)=2, (c,f)=3</text:span><text:span text:style-name="T99"/></text:p>
            <text:p text:style-name="P32" loext:marker-style-name="T99"><text:span text:style-name="T99">目前 MST： <text:s/>e──2──c──3──f</text:span><text:span text:style-name="T99"/></text:p>
          </table:table-cell>
        </table:table-row>
      </table:table>
      <text:p text:style-name="P5"/>
      <table:table table:name="表格73" table:style-name="表格73">
        <table:table-column table:style-name="表格73.A"/>
        <table:table-row table:style-name="表格73.1">
          <table:table-cell table:style-name="表格73.A1" office:value-type="string">
            <text:p text:style-name="P24" loext:marker-style-name="T40"><text:span text:style-name="T41">Step 3</text:span><text:span text:style-name="T42">：看 </text:span><text:span text:style-name="T41">(e,f)=4 → ⛔ </text:span><text:span text:style-name="T42">跳過！</text:span></text:p>
            <text:p text:style-name="P32" loext:marker-style-name="T99"><text:span text:style-name="T99">Find(e)=c <text:s text:c="3"/>Find(f)=c <text:s text:c="3"/>← 相同集合！</text:span><text:span text:style-name="T99"/></text:p>
            <text:p text:style-name="P32" loext:marker-style-name="T99"><text:span text:style-name="T99">為什麼會同集合？</text:span><text:span text:style-name="T99"/></text:p>
            <text:p text:style-name="P32" loext:marker-style-name="T99"><text:span text:style-name="T99"><text:s text:c="2"/>上面把 c,e 合併成一組，又把 c,f 合併進來，</text:span><text:span text:style-name="T99"/></text:p>
            <text:p text:style-name="P32" loext:marker-style-name="T99"><text:span text:style-name="T99"><text:s text:c="2"/>所以 e、c、f 都在同一組了。</text:span><text:span text:style-name="T99"/></text:p>
            <text:p text:style-name="P32" loext:marker-style-name="T99"><text:span text:style-name="T99">若加入 e─f：</text:span><text:span text:style-name="T99"/></text:p>
            <text:p text:style-name="P32" loext:marker-style-name="T99"><text:span text:style-name="T99"><text:s text:c="2"/>e──2──c──3──f</text:span><text:span text:style-name="T99"/></text:p>
            <text:p text:style-name="P32" loext:marker-style-name="T99"><text:span text:style-name="T99"><text:s text:c="2"/>└───────4───┘ <text:s/>← 形成三角形迴路！</text:span><text:span text:style-name="T99"/></text:p>
            <text:p text:style-name="P32" loext:marker-style-name="T99"><text:span text:style-name="T99">⛔ 跳過 (e,f)=4</text:span><text:span text:style-name="T99"/></text:p>
          </table:table-cell>
        </table:table-row>
      </table:table>
      <text:p text:style-name="P5"/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24" loext:marker-style-name="T81"><text:span text:style-name="T83">Step 4</text:span><text:span text:style-name="T82">：加入 </text:span><text:span text:style-name="T83">(f,g)=6</text:span></text:p>
            <text:p text:style-name="P32" loext:marker-style-name="T99"><text:span text:style-name="T99">Find(f)=c <text:s text:c="3"/>Find(g)=g <text:s text:c="3"/>← 不同集合，可以加！</text:span><text:span text:style-name="T99"/></text:p>
            <text:p text:style-name="P32" loext:marker-style-name="T99"><text:span text:style-name="T99">Union(f, g)</text:span><text:span text:style-name="T99"/></text:p>
            <text:p text:style-name="P32" loext:marker-style-name="T99"><text:span text:style-name="T99">集合狀態：{a} {b} {c,e,f,g} {d}</text:span><text:span text:style-name="T99"/></text:p>
            <text:p text:style-name="P32" loext:marker-style-name="T99"><text:span text:style-name="T99">已選邊（3條）：(c,e)=2, (c,f)=3, (f,g)=6</text:span><text:span text:style-name="T99"/></text:p>
            <text:p text:style-name="P32" loext:marker-style-name="T99"><text:span text:style-name="T99">目前 MST： <text:s/>e──2──c──3──f──6──g</text:span><text:span text:style-name="T99"/></text:p>
          </table:table-cell>
        </table:table-row>
      </table:table>
      <text:p text:style-name="P5"/>
      <table:table table:name="表格75" table:style-name="表格75">
        <table:table-column table:style-name="表格75.A"/>
        <table:table-row table:style-name="表格75.1">
          <table:table-cell table:style-name="表格75.A1" office:value-type="string">
            <text:p text:style-name="P24" loext:marker-style-name="T81"><text:span text:style-name="T83">Step 5</text:span><text:span text:style-name="T82">：加入 </text:span><text:span text:style-name="T83">(a,c)=9</text:span></text:p>
            <text:p text:style-name="P32" loext:marker-style-name="T99"><text:span text:style-name="T99">Find(a)=a <text:s text:c="3"/>Find(c)=c <text:s text:c="3"/>← 不同集合，可以加！</text:span><text:span text:style-name="T99"/></text:p>
            <text:p text:style-name="P32" loext:marker-style-name="T99"><text:span text:style-name="T99">Union(a, c)</text:span><text:span text:style-name="T99"/></text:p>
            <text:p text:style-name="P32" loext:marker-style-name="T99"><text:span text:style-name="T99">集合狀態：{a,c,e,f,g} {b} {d}</text:span><text:span text:style-name="T99"/></text:p>
            <text:p text:style-name="P32" loext:marker-style-name="T99"><text:span text:style-name="T99">已選邊（4條）：...+(a,c)=9</text:span><text:span text:style-name="T99"/></text:p>
            <text:p text:style-name="P32" loext:marker-style-name="T99"><text:span text:style-name="T99">目前 MST： <text:s text:c="4"/>a──9──c──3──f──6──g</text:span><text:span text:style-name="T99"/></text:p>
            <text:p text:style-name="P32" loext:marker-style-name="T99"><text:span text:style-name="T99"><text:s text:c="19"/>│</text:span><text:span text:style-name="T99"/></text:p>
            <text:p text:style-name="P32" loext:marker-style-name="T99"><text:span text:style-name="T99"><text:s text:c="19"/>2</text:span><text:span text:style-name="T99"/></text:p>
            <text:p text:style-name="P32" loext:marker-style-name="T99"><text:span text:style-name="T99"><text:s text:c="19"/>│</text:span><text:span text:style-name="T99"/></text:p>
            <text:p text:style-name="P32" loext:marker-style-name="T99"><text:span text:style-name="T99"><text:s text:c="19"/>e</text:span><text:span text:style-name="T99"/></text:p>
          </table:table-cell>
        </table:table-row>
      </table:table>
      <text:p text:style-name="P5"/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24" loext:marker-style-name="T81"><text:span text:style-name="T83">Step 6</text:span><text:span text:style-name="T82">：加入 </text:span><text:span text:style-name="T83">(a,d)=10</text:span></text:p>
            <text:p text:style-name="P32" loext:marker-style-name="T99"><text:span text:style-name="T99">Find(a)=a <text:s text:c="3"/>Find(d)=d <text:s text:c="3"/>← 不同集合，可以加！</text:span><text:span text:style-name="T99"/></text:p>
            <text:p text:style-name="P32" loext:marker-style-name="T99"><text:span text:style-name="T99">Union(a, d)</text:span><text:span text:style-name="T99"/></text:p>
            <text:p text:style-name="P32" loext:marker-style-name="T99"><text:span text:style-name="T99">集合狀態：{a,c,d,e,f,g} {b}</text:span><text:span text:style-name="T99"/></text:p>
            <text:p text:style-name="P32" loext:marker-style-name="T99"><text:span text:style-name="T99">已選邊（5條）：...+(a,d)=10</text:span><text:span text:style-name="T99"/></text:p>
            <text:p text:style-name="P32" loext:marker-style-name="T99"><text:span text:style-name="T99">目前 MST： <text:s text:c="4"/>d──10──a──9──c──3──f──6──g</text:span><text:span text:style-name="T99"/></text:p>
            <text:p text:style-name="P32" loext:marker-style-name="T99"><text:span text:style-name="T99"><text:s text:c="20"/>│ <text:s text:c="18"/>2</text:span><text:span text:style-name="T99"/></text:p>
            <text:p text:style-name="P32" loext:marker-style-name="T99"><text:span text:style-name="T99"><text:s text:c="20"/>│ <text:s text:c="18"/>│</text:span><text:span text:style-name="T99"/></text:p>
            <text:p text:style-name="P32" loext:marker-style-name="T99"><text:span text:style-name="T99"><text:s text:c="20"/>d <text:s text:c="18"/>e</text:span><text:span text:style-name="T99"/></text:p>
          </table:table-cell>
        </table:table-row>
      </table:table>
      <text:p text:style-name="P5"/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24" loext:marker-style-name="T40"><text:span text:style-name="T41">Step 7</text:span><text:span text:style-name="T42">：看 </text:span><text:span text:style-name="T41">(c,d)=12 → ⛔ </text:span><text:span text:style-name="T42">跳過！</text:span></text:p>
            <text:p text:style-name="P32"><text:soft-page-break/><text:span text:style-name="T99">Find(c)=a <text:s text:c="3"/>Find(d)=a <text:s text:c="3"/>← 相同集合！</text:span></text:p>
            <text:p text:style-name="P32" loext:marker-style-name="T99"><text:span text:style-name="T99">為什麼？</text:span><text:span text:style-name="T99"/></text:p>
            <text:p text:style-name="P32" loext:marker-style-name="T99"><text:span text:style-name="T99"><text:s text:c="2"/>步驟5：a 和 c 合併 → {a,c,...}</text:span><text:span text:style-name="T99"/></text:p>
            <text:p text:style-name="P32" loext:marker-style-name="T99"><text:span text:style-name="T99"><text:s text:c="2"/>步驟6：a 和 d 合併 → {a,c,d,...}</text:span><text:span text:style-name="T99"/></text:p>
            <text:p text:style-name="P32" loext:marker-style-name="T99"><text:span text:style-name="T99"><text:s text:c="2"/>現在 c 和 d 都在同一組了！</text:span><text:span text:style-name="T99"/></text:p>
            <text:p text:style-name="P32" loext:marker-style-name="T99"><text:span text:style-name="T99">若加入 c─d：c─a─d─c 形成三角形迴路！</text:span><text:span text:style-name="T99"/></text:p>
            <text:p text:style-name="P32" loext:marker-style-name="T99"><text:span text:style-name="T99">⛔ 跳過 (c,d)=12</text:span><text:span text:style-name="T99"/></text:p>
          </table:table-cell>
        </table:table-row>
      </table:table>
      <text:p text:style-name="P5"/>
      <table:table table:name="表格78" table:style-name="表格78">
        <table:table-column table:style-name="表格78.A"/>
        <table:table-row table:style-name="表格78.1">
          <table:table-cell table:style-name="表格78.A1" office:value-type="string">
            <text:p text:style-name="P24" loext:marker-style-name="T81"><text:span text:style-name="T83">Step 8</text:span><text:span text:style-name="T82">：加入 </text:span><text:span text:style-name="T83">(a,b)=13 ← </text:span><text:span text:style-name="T82">最後一條！</text:span></text:p>
            <text:p text:style-name="P32" loext:marker-style-name="T99"><text:span text:style-name="T99">Find(a)=a <text:s text:c="3"/>Find(b)=b <text:s text:c="3"/>← 不同集合，可以加！</text:span><text:span text:style-name="T99"/></text:p>
            <text:p text:style-name="P32" loext:marker-style-name="T99"><text:span text:style-name="T99">Union(a, b)</text:span><text:span text:style-name="T99"/></text:p>
            <text:p text:style-name="P32" loext:marker-style-name="T99"><text:span text:style-name="T99">集合狀態：{a,b,c,d,e,f,g} <text:s/>← 所有節點都在同一組！</text:span><text:span text:style-name="T99"/></text:p>
            <text:p text:style-name="P32" loext:marker-style-name="T99"><text:span text:style-name="T99">已選邊（6條）= V-1 = 7-1 = 6 <text:s/>✅ <text:s/>完成！</text:span><text:span text:style-name="T99"/></text:p>
            <text:p text:style-name="P32" loext:marker-style-name="T99"><text:span text:style-name="T99">最終 MST：</text:span><text:span text:style-name="T99"/></text:p>
            <text:p text:style-name="P32" loext:marker-style-name="T99"><text:span text:style-name="T99"><text:s text:c="2"/>b──13──a──9──c──3──f──6──g</text:span><text:span text:style-name="T99"/></text:p>
            <text:p text:style-name="P32" loext:marker-style-name="T99"><text:span text:style-name="T99"><text:s text:c="9"/>│ <text:s text:c="3"/>│</text:span><text:span text:style-name="T99"/></text:p>
            <text:p text:style-name="P32" loext:marker-style-name="T99"><text:span text:style-name="T99"><text:s text:c="8"/>10 <text:s text:c="3"/>2</text:span><text:span text:style-name="T99"/></text:p>
            <text:p text:style-name="P32" loext:marker-style-name="T99"><text:span text:style-name="T99"><text:s text:c="9"/>│ <text:s text:c="3"/>│</text:span><text:span text:style-name="T99"/></text:p>
            <text:p text:style-name="P32" loext:marker-style-name="T99"><text:span text:style-name="T99"><text:s text:c="9"/>d <text:s text:c="3"/>e</text:span><text:span text:style-name="T99"/></text:p>
          </table:table-cell>
        </table:table-row>
      </table:table>
      <text:p text:style-name="P5"/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24" loext:marker-style-name="T47"><text:span text:style-name="T48">✅ </text:span><text:span text:style-name="T49">最終答案</text:span></text:p>
            <text:p text:style-name="P16" loext:marker-style-name="T18"><text:span text:style-name="T20">MST </text:span><text:span text:style-name="T19">邊集合：</text:span><text:span text:style-name="T20">(c,e)=2, (c,f)=3, (f,g)=6, (a,c)=9, (a,d)=10, (a,b)=13</text:span></text:p>
            <text:p text:style-name="P16" loext:marker-style-name="T66"><text:span text:style-name="T67">總權重：</text:span><text:span text:style-name="T68">2 + 3 + 6 + 9 + 10 + 13 = 43</text:span></text:p>
            <text:p text:style-name="P41" loext:marker-style-name="T18"><text:span text:style-name="T19">邊數驗證：</text:span><text:span text:style-name="T20">V-1 = 7-1 = 6 </text:span><text:span text:style-name="T19">條 <text:s/>✅</text:span></text:p>
            <text:p text:style-name="P16" loext:marker-style-name="T66"><text:span text:style-name="T67">跳過原因整理：</text:span><text:span text:style-name="T66"/></text:p>
            <text:p text:style-name="P32" loext:marker-style-name="T84"><text:span text:style-name="T86"><text:s text:c="2"/>(e,f)=4 → c</text:span><text:span text:style-name="T85">、</text:span><text:span text:style-name="T86">e</text:span><text:span text:style-name="T85">、</text:span><text:span text:style-name="T86">f </text:span><text:span text:style-name="T85">已同集合，加了 </text:span><text:span text:style-name="T86">e─c─f─e </text:span><text:span text:style-name="T85">成三角形</text:span></text:p>
            <text:p text:style-name="P52" loext:marker-style-name="T84"><text:span text:style-name="T86"><text:s text:c="2"/>(c,d)=12 → c</text:span><text:span text:style-name="T85">、</text:span><text:span text:style-name="T86">d </text:span><text:span text:style-name="T85">已透過 </text:span><text:span text:style-name="T86">a </text:span><text:span text:style-name="T85">相連，加了 </text:span><text:span text:style-name="T86">c─a─d─c </text:span><text:span text:style-name="T85">成三角形</text:span></text:p>
          </table:table-cell>
        </table:table-row>
      </table:table>
      <text:p text:style-name="P5"/>
      <text:p text:style-name="Standard"/>
      <text:h text:style-name="P8" text:outline-level="1" loext:marker-style-name="T21"><text:span text:style-name="T22">七、考試速查卡 ── 最終背誦版</text:span><text:span text:style-name="T21"/></text:h>
      <text:p text:style-name="P5"/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6" loext:marker-style-name="T25"><text:span text:style-name="T26">⭐ Prim </text:span><text:span text:style-name="T27">三句口訣</text:span></text:p>
            <text:p text:style-name="P5" loext:marker-style-name="T18"><text:span text:style-name="T20">① </text:span><text:span text:style-name="T19">從任一節點出發，每次選「</text:span><text:span text:style-name="T20">T </text:span><text:span text:style-name="T19">內 → </text:span><text:span text:style-name="T20">T </text:span><text:span text:style-name="T19">外」最小邊。</text:span></text:p>
            <text:p text:style-name="P5" loext:marker-style-name="T18"><text:span text:style-name="T20">② </text:span><text:span text:style-name="T19">天然防止 </text:span><text:span text:style-name="T20">Cycle</text:span><text:span text:style-name="T19">，不需 </text:span><text:span text:style-name="T20">Union-Find</text:span><text:span text:style-name="T19">，也不需額外判斷。</text:span></text:p>
            <text:p text:style-name="P27" loext:marker-style-name="T18"><text:span text:style-name="T20">③ </text:span><text:span text:style-name="T19">矩陣版 </text:span><text:span text:style-name="T20">O(V²)</text:span><text:span text:style-name="T19">；</text:span><text:span text:style-name="T20">Heap </text:span><text:span text:style-name="T19">版 </text:span><text:span text:style-name="T20">O(E log V)</text:span><text:span text:style-name="T19">。稠密圖用矩陣版更省。</text:span></text:p>
          </table:table-cell>
        </table:table-row>
      </table:table>
      <text:p text:style-name="P5"/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6" loext:marker-style-name="T25"><text:span text:style-name="T26">⭐ Kruskal </text:span><text:span text:style-name="T27">三句口訣</text:span></text:p>
            <text:p text:style-name="P5" loext:marker-style-name="T18"><text:span text:style-name="T20">① </text:span><text:span text:style-name="T19">所有邊排序（小→大），</text:span><text:span text:style-name="T20">Union-Find </text:span><text:span text:style-name="T19">逐一判斷是否成環。</text:span></text:p>
            <text:p text:style-name="P5" loext:marker-style-name="T18"><text:span text:style-name="T20">② </text:span><text:span text:style-name="T19">同集合 → 跳過；不同集合 → 加入、合併。</text:span></text:p>
            <text:p text:style-name="P27" loext:marker-style-name="T18"><text:span text:style-name="T20">③ </text:span><text:span text:style-name="T19">時間複雜度 </text:span><text:span text:style-name="T20">O(E log E)</text:span><text:span text:style-name="T19">，稀疏圖（邊少）時效率最好。</text:span></text:p>
          </table:table-cell>
        </table:table-row>
      </table:table>
      <text:p text:style-name="P5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6" loext:marker-style-name="T25"><text:span text:style-name="T26">⭐ Sollin </text:span><text:span text:style-name="T27">三句口訣</text:span></text:p>
            <text:p text:style-name="P5" loext:marker-style-name="T18"><text:span text:style-name="T20">① </text:span><text:span text:style-name="T19">每個 </text:span><text:span text:style-name="T20">Component </text:span><text:span text:style-name="T19">同時找自己最短外連邊，全體同時合併。</text:span></text:p>
            <text:p text:style-name="P5" loext:marker-style-name="T18"><text:span text:style-name="T20">② </text:span><text:span text:style-name="T19">每輪至少合併一半，最多 </text:span><text:span text:style-name="T20">log V </text:span><text:span text:style-name="T19">輪結束。</text:span></text:p>
            <text:p text:style-name="P27" loext:marker-style-name="T18"><text:span text:style-name="T20">③ </text:span><text:span text:style-name="T19">適合平行 </text:span><text:span text:style-name="T20">/ </text:span><text:span text:style-name="T19">分散式計算，時間複雜度 </text:span><text:span text:style-name="T20">O(E log V)</text:span><text:span text:style-name="T19">。</text:span></text:p>
          </table:table-cell>
        </table:table-row>
      </table:table>
      <text:p text:style-name="P5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6" loext:marker-style-name="T25"><text:span text:style-name="T26">⭐ MST </text:span><text:span text:style-name="T27">必背特性</text:span></text:p>
            <text:p text:style-name="P5" loext:marker-style-name="T18"><text:span text:style-name="T20">① V-1 </text:span><text:span text:style-name="T19">條邊：少一條有孤立點；多一條必有迴路。</text:span></text:p>
            <text:p text:style-name="P5" loext:marker-style-name="T18"><text:span text:style-name="T20">② </text:span><text:span text:style-name="T19">無 </text:span><text:span text:style-name="T20">Cycle</text:span><text:span text:style-name="T19">：有環必有冗餘邊，去掉更輕。</text:span></text:p>
            <text:p text:style-name="P5" loext:marker-style-name="T18"><text:span text:style-name="T20">③ </text:span><text:span text:style-name="T19">連通圖才有 </text:span><text:span text:style-name="T20">MST</text:span><text:span text:style-name="T19">；不連通 → 最小擴張森林。</text:span></text:p>
            <text:p text:style-name="P27" loext:marker-style-name="T18"><text:span text:style-name="T20">④ Cut Property</text:span><text:span text:style-name="T19">：任意把圖切成兩半，跨切割的最小邊必屬於某棵 </text:span><text:span text:style-name="T20">MST</text:span><text:span text:style-name="T19">；</text:span></text:p>
            <text:p text:style-name="P23" loext:marker-style-name="T61"><text:span text:style-name="T62">若該邊是跨越該 </text:span><text:span text:style-name="T63">Cut </text:span><text:span text:style-name="T62">的唯一最小邊，則它必屬於所有 </text:span><text:span text:style-name="T63">MST</text:span><text:span text:style-name="T62">。</text:span></text:p>
          </table:table-cell>
        </table:table-row>
      </table:table>
      <text:p text:style-name="P5"/>
      <table:table table:name="表格84" table:style-name="表格84">
        <table:table-column table:style-name="表格84.A"/>
        <table:table-column table:style-name="表格84.B"/>
        <table:table-column table:style-name="表格84.C"/>
        <table:table-column table:style-name="表格84.D"/>
        <table:table-column table:style-name="表格84.E"/>
        <table:table-row table:style-name="表格84.1">
          <table:table-cell table:style-name="表格84.A1" office:value-type="string">
            <text:p text:style-name="P5" loext:marker-style-name="T225"><text:span text:style-name="T226">演算法</text:span><text:span text:style-name="T225"/></text:p>
          </table:table-cell>
          <table:table-cell table:style-name="表格84.A1" office:value-type="string">
            <text:p text:style-name="P5" loext:marker-style-name="T225"><text:span text:style-name="T226">出發點</text:span><text:span text:style-name="T225"/></text:p>
          </table:table-cell>
          <table:table-cell table:style-name="表格84.A1" office:value-type="string">
            <text:p text:style-name="P5" loext:marker-style-name="T225"><text:span text:style-name="T226">核心操作</text:span><text:span text:style-name="T225"/></text:p>
          </table:table-cell>
          <table:table-cell table:style-name="表格84.A1" office:value-type="string">
            <text:p text:style-name="P5" loext:marker-style-name="T225"><text:span text:style-name="T226">時間複雜度</text:span><text:span text:style-name="T225"/></text:p>
          </table:table-cell>
          <table:table-cell table:style-name="表格84.A1" office:value-type="string">
            <text:p text:style-name="P5" loext:marker-style-name="T225"><text:span text:style-name="T226">適合圖型</text:span><text:span text:style-name="T225"/></text:p>
          </table:table-cell>
        </table:table-row>
        <table:table-row table:style-name="表格84.1">
          <table:table-cell table:style-name="表格84.A2" office:value-type="string">
            <text:p text:style-name="P5" loext:marker-style-name="T227"><text:span text:style-name="T228">Prim</text:span><text:span text:style-name="T227"/></text:p>
          </table:table-cell>
          <table:table-cell table:style-name="表格84.A2" office:value-type="string">
            <text:p text:style-name="P5" loext:marker-style-name="T227"><text:span text:style-name="T229">任一節點</text:span><text:span text:style-name="T227"/></text:p>
          </table:table-cell>
          <table:table-cell table:style-name="表格84.A2" office:value-type="string">
            <text:p text:style-name="P5" loext:marker-style-name="T227"><text:span text:style-name="T228">T</text:span><text:span text:style-name="T229">內→</text:span><text:span text:style-name="T228">T</text:span><text:span text:style-name="T229">外，選最小邊</text:span></text:p>
          </table:table-cell>
          <table:table-cell table:style-name="表格84.A2" office:value-type="string">
            <text:p text:style-name="P5" loext:marker-style-name="T227"><text:span text:style-name="T228">O(V²) / O(ElogV)</text:span><text:span text:style-name="T227"/></text:p>
          </table:table-cell>
          <table:table-cell table:style-name="表格84.A2" office:value-type="string">
            <text:p text:style-name="P5" loext:marker-style-name="T227"><text:span text:style-name="T229">稠密圖</text:span><text:span text:style-name="T227"/></text:p>
          </table:table-cell>
        </table:table-row>
        <table:table-row table:style-name="表格84.1">
          <table:table-cell table:style-name="表格84.A3" office:value-type="string">
            <text:p text:style-name="P5" loext:marker-style-name="T227"><text:span text:style-name="T228">Kruskal</text:span><text:span text:style-name="T227"/></text:p>
          </table:table-cell>
          <table:table-cell table:style-name="表格84.A3" office:value-type="string">
            <text:p text:style-name="P5" loext:marker-style-name="T227"><text:span text:style-name="T229">最小邊</text:span><text:span text:style-name="T227"/></text:p>
          </table:table-cell>
          <table:table-cell table:style-name="表格84.A3" office:value-type="string">
            <text:p text:style-name="P5" loext:marker-style-name="T227"><text:span text:style-name="T229">邊排序</text:span><text:span text:style-name="T228">+Union-Find</text:span></text:p>
          </table:table-cell>
          <table:table-cell table:style-name="表格84.A3" office:value-type="string">
            <text:p text:style-name="P5" loext:marker-style-name="T227"><text:span text:style-name="T228">O(E log E)</text:span><text:span text:style-name="T227"/></text:p>
          </table:table-cell>
          <table:table-cell table:style-name="表格84.A3" office:value-type="string">
            <text:p text:style-name="P5" loext:marker-style-name="T227"><text:span text:style-name="T229">稀疏圖</text:span><text:span text:style-name="T227"/></text:p>
          </table:table-cell>
        </table:table-row>
        <table:table-row table:style-name="表格84.1">
          <table:table-cell table:style-name="表格84.A2" office:value-type="string">
            <text:p text:style-name="P5" loext:marker-style-name="T227"><text:span text:style-name="T228">Sollin</text:span><text:span text:style-name="T227"/></text:p>
          </table:table-cell>
          <table:table-cell table:style-name="表格84.A2" office:value-type="string">
            <text:p text:style-name="P5" loext:marker-style-name="T227"><text:span text:style-name="T229">所有節點同時</text:span><text:span text:style-name="T227"/></text:p>
          </table:table-cell>
          <table:table-cell table:style-name="表格84.A2" office:value-type="string">
            <text:p text:style-name="P5" loext:marker-style-name="T227"><text:span text:style-name="T229">各</text:span><text:span text:style-name="T228">Component</text:span><text:span text:style-name="T229">找最短外連邊</text:span></text:p>
          </table:table-cell>
          <table:table-cell table:style-name="表格84.A2" office:value-type="string">
            <text:p text:style-name="P5" loext:marker-style-name="T227"><text:span text:style-name="T228">O(E log V)</text:span><text:span text:style-name="T227"/></text:p>
          </table:table-cell>
          <table:table-cell table:style-name="表格84.A2" office:value-type="string">
            <text:p text:style-name="P5" loext:marker-style-name="T227"><text:span text:style-name="T229">平行</text:span><text:span text:style-name="T228">/</text:span><text:span text:style-name="T229">分散式</text:span></text:p>
          </table:table-cell>
        </table:table-row>
      </table:table>
      <text:p text:style-name="P5"/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6" loext:marker-style-name="T25"><text:span text:style-name="T26">113</text:span><text:span text:style-name="T27">閩</text:span><text:span text:style-name="T26">Q5 </text:span><text:span text:style-name="T27">快速記憶</text:span></text:p>
            <text:p text:style-name="P25" loext:marker-style-name="T43"><text:span text:style-name="T43">跳過：(e,f)=4 → c,e,f 同集合 <text:s text:c="3"/>(c,d)=12 → c,d 已透過 a 相連</text:span><text:span text:style-name="T43"/></text:p>
            <text:p text:style-name="P36" loext:marker-style-name="T25"><text:span text:style-name="T26">MST</text:span><text:span text:style-name="T27">：</text:span><text:span text:style-name="T26">ce=2 + cf=3 + fg=6 + ac=9 + ad=10 + ab=13 = 43</text:span></text:p>
          </table:table-cell>
        </table:table-row>
      </table:table>
      <text:p text:style-name="P5"/>
      <text:p text:style-name="P5"/>
      <text:p text:style-name="P53" loext:marker-style-name="T230"><text:span text:style-name="T231">本筆記包含：名詞解釋 </text:span><text:span text:style-name="T232">× </text:span><text:span text:style-name="T231">完整圖解 </text:span><text:span text:style-name="T232">× </text:span><text:span text:style-name="T231">逐步推導 </text:span><text:span text:style-name="T232">× C++</text:span><text:span text:style-name="T231">程式實作 </text:span><text:span text:style-name="T232">× </text:span><text:span text:style-name="T231">公職真題</text:span><text:span text:style-name="T232">113</text:span><text:span text:style-name="T231">閩</text:span><text:span text:style-name="T232">Q5</text:span></text:p>
      <text:p text:style-name="P4" loext:marker-style-name="T233"><text:span text:style-name="T234">最小擴張樹 </text:span><text:span text:style-name="T235">MST </text:span><text:span text:style-name="T234">完整考試筆記 <text:s/></text:span><text:span text:style-name="T235">v3.1</text:span><text:span text:style-name="T234">（</text:span><text:span text:style-name="T235">1-2</text:span><text:span text:style-name="T234">章節改版）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TW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TW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page" loext:hyphenation-keep-type="column" loext:hyphenation-keep-line="true" style:punctuation-wrap="simple" style:writing-mode="lr-tb"/>
      <style:text-properties style:use-window-font-color="true" loext:opacity="0%" style:font-name="Arial" fo:font-family="Arial" style:font-family-generic="swiss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TW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353cm" style:contextual-spacing="false"/>
      <style:text-properties fo:color="#ffffff" loext:opacity="100%" style:font-name="Arial" fo:font-family="Arial" style:font-family-generic="swiss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82cm" style:contextual-spacing="false"/>
      <style:text-properties fo:color="#ffffff" loext:opacity="100%" style:font-name="Arial" fo:font-family="Arial" style:font-family-generic="swiss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Arial" fo:font-family="Arial" style:font-family-generic="swiss" style:font-pitch="variable" fo:font-size="11pt" fo:language="en" fo:country="US" fo:font-weight="bold" style:letter-kerning="false" style:font-name-asian="Arial1" style:font-family-asian="Arial" style:font-family-generic-asian="system" style:font-pitch-asian="variable" style:font-size-asian="11pt" style:language-asian="zh" style:country-asian="TW" style:font-weight-asian="bold" style:font-name-complex="Arial1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Arial" fo:font-family="Arial" style:font-family-generic="swiss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TW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141cm" style:contextual-spacing="false" fo:padding-left="0cm" fo:padding-right="0cm" fo:padding-top="0cm" fo:padding-bottom="0.035cm" fo:border-left="none" fo:border-right="none" fo:border-top="none" fo:border-bottom="0.51pt solid #2e75b6">
        <style:tab-stops>
          <style:tab-stop style:position="13cm" style:type="right"/>
        </style:tab-stops>
      </style:paragraph-properties>
    </style:style>
    <style:style style:name="MP2" style:family="paragraph" style:parent-style-name="Standard">
      <style:paragraph-properties fo:margin-top="0.141cm" fo:margin-bottom="0cm" style:contextual-spacing="false" fo:padding-left="0cm" fo:padding-right="0cm" fo:padding-top="0.035cm" fo:padding-bottom="0cm" fo:border-left="none" fo:border-right="none" fo:border-top="0.51pt solid #2e75b6" fo:border-bottom="none">
        <style:tab-stops>
          <style:tab-stop style:position="13cm" style:type="right"/>
        </style:tab-stops>
      </style:paragraph-properties>
    </style:style>
    <style:style style:name="MT1" style:family="text">
      <style:text-properties fo:color="#7f8c8d" loext:opacity="100%" style:font-name="Arial" fo:font-size="9pt" style:font-name-asian="Arial1" style:font-size-asian="9pt" style:font-name-complex="Arial1" style:font-size-complex="9pt"/>
    </style:style>
    <style:style style:name="MT2" style:family="text">
      <style:text-properties fo:color="#7f8c8d" loext:opacity="100%" style:font-name="Arial" fo:font-size="9pt" style:font-size-asian="9pt" style:font-name-complex="Arial1" style:font-size-complex="9pt"/>
    </style:style>
    <style:style style:name="MT3" style:family="text">
      <style:text-properties fo:color="#7f8c8d" loext:opacity="100%" fo:font-size="9pt" style:font-name-asian="Arial1" style:font-size-asian="9pt" style:font-name-complex="Arial1" style:font-size-complex="9pt"/>
    </style:style>
    <style:style style:name="MT4" style:family="text">
      <style:text-properties fo:color="#7f8c8d" loext:opacity="100%" fo:font-size="8pt" style:font-name-asian="Arial1" style:font-size-asian="8pt" style:font-name-complex="Arial1" style:font-size-complex="8pt"/>
    </style:style>
    <style:style style:name="MT5" style:family="text">
      <style:text-properties fo:color="#7f8c8d" loext:opacity="100%" style:font-name="Arial" fo:font-size="8pt" style:font-size-asian="8pt" style:font-name-complex="Arial1" style:font-size-complex="8pt"/>
    </style:style>
    <style:style style:name="MT6" style:family="text">
      <style:text-properties fo:color="#1f3864" loext:opacity="100%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【第</text:span><text:span text:style-name="MT3">15</text:span><text:span text:style-name="MT2">章】最小擴張樹 </text:span><text:span text:style-name="MT3">MST<text:tab/></text:span><text:span text:style-name="MT2">最小擴張樹完整考試筆記 </text:span><text:span text:style-name="MT3">v5.0</text:span></text:p>
      </style:header>
      <style:footer>
        <text:p text:style-name="MP2"><text:span text:style-name="MT4">MST </text:span><text:span text:style-name="MT5">完整筆記 </text:span><text:span text:style-name="MT4">v5.0<text:tab/></text:span><text:span text:style-name="MT5">第 </text:span><text:span text:style-name="MT6"><text:page-number text:select-page="current">28</text:page-number></text:span><text:span text:style-name="MT5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6T08:37:28</meta:creation-date>
    <meta:initial-creator>Un-named</meta:initial-creator>
    <dc:language>en-US</dc:language>
    <dc:date>2026-06-28T15:17:40.638387100</dc:date>
    <meta:editing-cycles>103</meta:editing-cycles>
    <meta:editing-duration>P1DT5H10M35S</meta:editing-duration>
    <meta:generator>LibreOffice/26.2.4.2$Windows_X86_64 LibreOffice_project/0229ac93fcf0d7cbc6376066c6f35021cef002dc</meta:generator>
    <meta:document-statistic meta:table-count="88" meta:image-count="6" meta:object-count="0" meta:page-count="28" meta:paragraph-count="903" meta:word-count="11608" meta:character-count="22536" meta:non-whitespace-character-count="17195"/>
    <meta:user-defined meta:name="AppVersion">15.0000</meta:user-defined>
  </office:meta>
</office:document-meta>
</file>