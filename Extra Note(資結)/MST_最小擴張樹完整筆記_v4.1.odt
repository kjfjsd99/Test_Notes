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24000001F643D3A16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6.228cm" fo:margin-left="0cm" fo:margin-top="0cm" fo:margin-bottom="0cm" table:align="left" style:writing-mode="page"/>
    </style:style>
    <style:style style:name="表格1.A" style:family="table-column">
      <style:table-column-properties style:column-width="16.228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f3864" fo:padding="0.706cm" fo:border="none">
        <style:background-image/>
      </style:table-cell-properties>
    </style:style>
    <style:style style:name="表格2" style:family="table">
      <style:table-properties style:width="16.228cm" fo:margin-left="0.009cm" fo:margin-top="0cm" fo:margin-bottom="0cm" table:align="left" style:writing-mode="page"/>
    </style:style>
    <style:style style:name="表格2.A" style:family="table-column">
      <style:table-column-properties style:column-width="16.228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" style:family="table">
      <style:table-properties style:width="16.228cm" fo:margin-left="0.009cm" fo:margin-top="0cm" fo:margin-bottom="0cm" table:align="left" style:writing-mode="page"/>
    </style:style>
    <style:style style:name="表格3.A" style:family="table-column">
      <style:table-column-properties style:column-width="16.228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表格4" style:family="table">
      <style:table-properties style:width="16.228cm" fo:margin-left="0.009cm" fo:margin-top="0cm" fo:margin-bottom="0cm" table:align="left" style:writing-mode="page"/>
    </style:style>
    <style:style style:name="表格4.A" style:family="table-column">
      <style:table-column-properties style:column-width="16.228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6e4f0" fo:padding-left="0.353cm" fo:padding-right="0.353cm" fo:padding-top="0.212cm" fo:padding-bottom="0.212cm" fo:border="0.5pt solid #1f3864">
        <style:background-image/>
      </style:table-cell-properties>
    </style:style>
    <style:style style:name="表格5" style:family="table">
      <style:table-properties style:width="16.228cm" fo:margin-left="0.009cm" fo:margin-top="0cm" fo:margin-bottom="0cm" table:align="left" style:writing-mode="page"/>
    </style:style>
    <style:style style:name="表格5.A" style:family="table-column">
      <style:table-column-properties style:column-width="8.043cm"/>
    </style:style>
    <style:style style:name="表格5.B" style:family="table-column">
      <style:table-column-properties style:column-width="8.184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adbd8" fo:padding-left="0.282cm" fo:padding-right="0.176cm" fo:padding-top="0.176cm" fo:padding-bottom="0.176cm" fo:border="0.5pt solid #2e75b6">
        <style:background-image/>
      </style:table-cell-properties>
    </style:style>
    <style:style style:name="表格5.B1" style:family="table-cell">
      <style:table-cell-properties fo:background-color="#d5f5e3" fo:padding-left="0.282cm" fo:padding-right="0.176cm" fo:padding-top="0.176cm" fo:padding-bottom="0.176cm" fo:border="0.5pt solid #2e75b6">
        <style:background-image/>
      </style:table-cell-properties>
    </style:style>
    <style:style style:name="表格6" style:family="table">
      <style:table-properties style:width="16.228cm" fo:margin-left="0.009cm" fo:margin-top="0cm" fo:margin-bottom="0cm" table:align="left" style:writing-mode="page"/>
    </style:style>
    <style:style style:name="表格6.A" style:family="table-column">
      <style:table-column-properties style:column-width="8.043cm"/>
    </style:style>
    <style:style style:name="表格6.B" style:family="table-column">
      <style:table-column-properties style:column-width="8.184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adbd8" fo:padding-left="0.282cm" fo:padding-right="0.176cm" fo:padding-top="0.176cm" fo:padding-bottom="0.176cm" fo:border="0.5pt solid #2e75b6">
        <style:background-image/>
      </style:table-cell-properties>
    </style:style>
    <style:style style:name="表格6.B1" style:family="table-cell">
      <style:table-cell-properties fo:background-color="#d5f5e3" fo:padding-left="0.282cm" fo:padding-right="0.176cm" fo:padding-top="0.176cm" fo:padding-bottom="0.176cm" fo:border="0.5pt solid #2e75b6">
        <style:background-image/>
      </style:table-cell-properties>
    </style:style>
    <style:style style:name="表格7" style:family="table">
      <style:table-properties style:width="16.228cm" fo:margin-left="0.009cm" fo:margin-top="0cm" fo:margin-bottom="0cm" table:align="left" style:writing-mode="page"/>
    </style:style>
    <style:style style:name="表格7.A" style:family="table-column">
      <style:table-column-properties style:column-width="16.228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8" style:family="table">
      <style:table-properties style:width="16.228cm" fo:margin-left="0.009cm" fo:margin-top="0cm" fo:margin-bottom="0cm" table:align="left" style:writing-mode="page"/>
    </style:style>
    <style:style style:name="表格8.A" style:family="table-column">
      <style:table-column-properties style:column-width="16.228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9" style:family="table">
      <style:table-properties style:width="16.228cm" fo:margin-left="0.009cm" fo:margin-top="0cm" fo:margin-bottom="0cm" table:align="left" style:writing-mode="page"/>
    </style:style>
    <style:style style:name="表格9.A" style:family="table-column">
      <style:table-column-properties style:column-width="8.043cm"/>
    </style:style>
    <style:style style:name="表格9.B" style:family="table-column">
      <style:table-column-properties style:column-width="8.184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adbd8" fo:padding-left="0.282cm" fo:padding-right="0.176cm" fo:padding-top="0.176cm" fo:padding-bottom="0.176cm" fo:border="0.5pt solid #2e75b6">
        <style:background-image/>
      </style:table-cell-properties>
    </style:style>
    <style:style style:name="表格10" style:family="table">
      <style:table-properties style:width="16.228cm" fo:margin-left="0.009cm" fo:margin-top="0cm" fo:margin-bottom="0cm" table:align="left" style:writing-mode="page"/>
    </style:style>
    <style:style style:name="表格10.A" style:family="table-column">
      <style:table-column-properties style:column-width="16.228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11" style:family="table">
      <style:table-properties style:width="16.228cm" fo:margin-left="0.009cm" fo:margin-top="0cm" fo:margin-bottom="0cm" table:align="left" style:writing-mode="page"/>
    </style:style>
    <style:style style:name="表格11.A" style:family="table-column">
      <style:table-column-properties style:column-width="16.228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12" style:family="table">
      <style:table-properties style:width="16.228cm" fo:margin-left="0.009cm" fo:margin-top="0cm" fo:margin-bottom="0cm" table:align="left" style:writing-mode="page"/>
    </style:style>
    <style:style style:name="表格12.A" style:family="table-column">
      <style:table-column-properties style:column-width="16.228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6e4f0" fo:padding-left="0.353cm" fo:padding-right="0.353cm" fo:padding-top="0.212cm" fo:padding-bottom="0.212cm" fo:border="0.5pt solid #1f3864">
        <style:background-image/>
      </style:table-cell-properties>
    </style:style>
    <style:style style:name="表格13" style:family="table">
      <style:table-properties style:width="16.228cm" fo:margin-left="0.009cm" fo:margin-top="0cm" fo:margin-bottom="0cm" table:align="left" style:writing-mode="page"/>
    </style:style>
    <style:style style:name="表格13.A" style:family="table-column">
      <style:table-column-properties style:column-width="16.228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表格14" style:family="table">
      <style:table-properties style:width="16.228cm" fo:margin-left="0.009cm" fo:margin-top="0cm" fo:margin-bottom="0cm" table:align="left" style:writing-mode="page"/>
    </style:style>
    <style:style style:name="表格14.A" style:family="table-column">
      <style:table-column-properties style:column-width="3.246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1f3864" fo:padding-left="0.176cm" fo:padding-right="0.176cm" fo:padding-top="0.141cm" fo:padding-bottom="0.141cm" fo:border="0.5pt solid #1f3864">
        <style:background-image/>
      </style:table-cell-properties>
    </style:style>
    <style:style style:name="表格14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表格14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表格15" style:family="table">
      <style:table-properties style:width="16.228cm" fo:margin-left="0.009cm" fo:margin-top="0cm" fo:margin-bottom="0cm" table:align="left" style:writing-mode="page"/>
    </style:style>
    <style:style style:name="表格15.A" style:family="table-column">
      <style:table-column-properties style:column-width="16.228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16" style:family="table">
      <style:table-properties style:width="16.228cm" fo:margin-left="0.009cm" fo:margin-top="0cm" fo:margin-bottom="0cm" table:align="left" style:writing-mode="page"/>
    </style:style>
    <style:style style:name="表格16.A" style:family="table-column">
      <style:table-column-properties style:column-width="16.228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17" style:family="table">
      <style:table-properties style:width="16.228cm" fo:margin-left="0.009cm" fo:margin-top="0cm" fo:margin-bottom="0cm" table:align="left" style:writing-mode="page"/>
    </style:style>
    <style:style style:name="表格17.A" style:family="table-column">
      <style:table-column-properties style:column-width="16.228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19" style:family="table">
      <style:table-properties style:width="16.228cm" fo:margin-left="0.009cm" fo:margin-top="0cm" fo:margin-bottom="0cm" table:align="left" style:writing-mode="page"/>
    </style:style>
    <style:style style:name="表格19.A" style:family="table-column">
      <style:table-column-properties style:column-width="16.228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20" style:family="table">
      <style:table-properties style:width="16.228cm" fo:margin-left="0.009cm" fo:margin-top="0cm" fo:margin-bottom="0cm" table:align="left" style:writing-mode="page"/>
    </style:style>
    <style:style style:name="表格20.A" style:family="table-column">
      <style:table-column-properties style:column-width="16.228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21" style:family="table">
      <style:table-properties style:width="16.228cm" fo:margin-left="0.009cm" fo:margin-top="0cm" fo:margin-bottom="0cm" table:align="left" style:writing-mode="page"/>
    </style:style>
    <style:style style:name="表格21.A" style:family="table-column">
      <style:table-column-properties style:column-width="16.228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22" style:family="table">
      <style:table-properties style:width="16.228cm" fo:margin-left="0.009cm" fo:margin-top="0cm" fo:margin-bottom="0cm" table:align="left" style:writing-mode="page"/>
    </style:style>
    <style:style style:name="表格22.A" style:family="table-column">
      <style:table-column-properties style:column-width="16.228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23" style:family="table">
      <style:table-properties style:width="16.228cm" fo:margin-left="0.009cm" fo:margin-top="0cm" fo:margin-bottom="0cm" table:align="left" style:writing-mode="page"/>
    </style:style>
    <style:style style:name="表格23.A" style:family="table-column">
      <style:table-column-properties style:column-width="16.228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24" style:family="table">
      <style:table-properties style:width="16.228cm" fo:margin-left="0.009cm" fo:margin-top="0cm" fo:margin-bottom="0cm" table:align="left" style:writing-mode="page"/>
    </style:style>
    <style:style style:name="表格24.A" style:family="table-column">
      <style:table-column-properties style:column-width="16.228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1f3864" fo:padding-left="0.353cm" fo:padding-right="0.353cm" fo:padding-top="0.212cm" fo:padding-bottom="0.212cm" fo:border="0.5pt solid #1f3864">
        <style:background-image/>
      </style:table-cell-properties>
    </style:style>
    <style:style style:name="表格25" style:family="table">
      <style:table-properties style:width="16.228cm" fo:margin-left="0.009cm" fo:margin-top="0cm" fo:margin-bottom="0cm" table:align="left" style:writing-mode="page"/>
    </style:style>
    <style:style style:name="表格25.A" style:family="table-column">
      <style:table-column-properties style:column-width="2.82cm"/>
    </style:style>
    <style:style style:name="表格25.B" style:family="table-column">
      <style:table-column-properties style:column-width="3.881cm"/>
    </style:style>
    <style:style style:name="表格25.C" style:family="table-column">
      <style:table-column-properties style:column-width="3.528cm"/>
    </style:style>
    <style:style style:name="表格25.D" style:family="table-column">
      <style:table-column-properties style:column-width="5.999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表格25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表格25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新增表格62" style:family="table">
      <style:table-properties style:width="16.228cm" fo:margin-left="0.009cm" fo:margin-top="0cm" fo:margin-bottom="0cm" table:align="left" style:writing-mode="page"/>
    </style:style>
    <style:style style:name="新增表格62.A" style:family="table-column">
      <style:table-column-properties style:column-width="16.228cm"/>
    </style:style>
    <style:style style:name="新增表格62.1" style:family="table-row">
      <style:table-row-properties fo:keep-together="auto"/>
    </style:style>
    <style:style style:name="新增表格62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新增表格63" style:family="table">
      <style:table-properties style:width="16.228cm" fo:margin-left="0.009cm" fo:margin-top="0cm" fo:margin-bottom="0cm" table:align="left" style:writing-mode="page"/>
    </style:style>
    <style:style style:name="新增表格63.A" style:family="table-column">
      <style:table-column-properties style:column-width="16.228cm"/>
    </style:style>
    <style:style style:name="新增表格63.1" style:family="table-row">
      <style:table-row-properties fo:keep-together="auto"/>
    </style:style>
    <style:style style:name="新增表格63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新增表格64" style:family="table">
      <style:table-properties style:width="16.228cm" fo:margin-left="0.009cm" fo:margin-top="0cm" fo:margin-bottom="0cm" table:align="left" style:writing-mode="page"/>
    </style:style>
    <style:style style:name="新增表格64.A" style:family="table-column">
      <style:table-column-properties style:column-width="2.82cm"/>
    </style:style>
    <style:style style:name="新增表格64.B" style:family="table-column">
      <style:table-column-properties style:column-width="3.881cm"/>
    </style:style>
    <style:style style:name="新增表格64.C" style:family="table-column">
      <style:table-column-properties style:column-width="3.528cm"/>
    </style:style>
    <style:style style:name="新增表格64.D" style:family="table-column">
      <style:table-column-properties style:column-width="5.999cm"/>
    </style:style>
    <style:style style:name="新增表格64.1" style:family="table-row">
      <style:table-row-properties fo:keep-together="auto"/>
    </style:style>
    <style:style style:name="新增表格64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新增表格64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新增表格64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新增表格64.A4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新增表格65" style:family="table">
      <style:table-properties style:width="16.228cm" fo:margin-left="0.009cm" fo:margin-top="0cm" fo:margin-bottom="0cm" table:align="left" style:writing-mode="page"/>
    </style:style>
    <style:style style:name="新增表格65.A" style:family="table-column">
      <style:table-column-properties style:column-width="16.228cm"/>
    </style:style>
    <style:style style:name="新增表格65.1" style:family="table-row">
      <style:table-row-properties fo:keep-together="auto"/>
    </style:style>
    <style:style style:name="新增表格65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新增表格66" style:family="table">
      <style:table-properties style:width="16.228cm" fo:margin-left="0.009cm" fo:margin-top="0cm" fo:margin-bottom="0cm" table:align="left" style:writing-mode="page"/>
    </style:style>
    <style:style style:name="新增表格66.A" style:family="table-column">
      <style:table-column-properties style:column-width="2.82cm"/>
    </style:style>
    <style:style style:name="新增表格66.B" style:family="table-column">
      <style:table-column-properties style:column-width="3.881cm"/>
    </style:style>
    <style:style style:name="新增表格66.C" style:family="table-column">
      <style:table-column-properties style:column-width="3.528cm"/>
    </style:style>
    <style:style style:name="新增表格66.D" style:family="table-column">
      <style:table-column-properties style:column-width="5.999cm"/>
    </style:style>
    <style:style style:name="新增表格66.1" style:family="table-row">
      <style:table-row-properties fo:keep-together="auto"/>
    </style:style>
    <style:style style:name="新增表格66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新增表格66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新增表格66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新增表格66.A5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新增表格67" style:family="table">
      <style:table-properties style:width="16.228cm" fo:margin-left="0.009cm" fo:margin-top="0cm" fo:margin-bottom="0cm" table:align="left" style:writing-mode="page"/>
    </style:style>
    <style:style style:name="新增表格67.A" style:family="table-column">
      <style:table-column-properties style:column-width="16.228cm"/>
    </style:style>
    <style:style style:name="新增表格67.1" style:family="table-row">
      <style:table-row-properties fo:keep-together="auto"/>
    </style:style>
    <style:style style:name="新增表格67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26" style:family="table">
      <style:table-properties style:width="16.228cm" fo:margin-left="0.009cm" fo:margin-top="0cm" fo:margin-bottom="0cm" table:align="left" style:writing-mode="page"/>
    </style:style>
    <style:style style:name="表格26.A" style:family="table-column">
      <style:table-column-properties style:column-width="16.228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27" style:family="table">
      <style:table-properties style:width="16.228cm" fo:margin-left="0.009cm" fo:margin-top="0cm" fo:margin-bottom="0cm" table:align="left" style:writing-mode="page"/>
    </style:style>
    <style:style style:name="表格27.A" style:family="table-column">
      <style:table-column-properties style:column-width="16.228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28" style:family="table">
      <style:table-properties style:width="16.228cm" fo:margin-left="0.009cm" fo:margin-top="0cm" fo:margin-bottom="0cm" table:align="left" style:writing-mode="page"/>
    </style:style>
    <style:style style:name="表格28.A" style:family="table-column">
      <style:table-column-properties style:column-width="16.228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29" style:family="table">
      <style:table-properties style:width="16.228cm" fo:margin-left="0.009cm" fo:margin-top="0cm" fo:margin-bottom="0cm" table:align="left" style:writing-mode="page"/>
    </style:style>
    <style:style style:name="表格29.A" style:family="table-column">
      <style:table-column-properties style:column-width="16.228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0" style:family="table">
      <style:table-properties style:width="16.228cm" fo:margin-left="0.009cm" fo:margin-top="0cm" fo:margin-bottom="0cm" table:align="left" style:writing-mode="page"/>
    </style:style>
    <style:style style:name="表格30.A" style:family="table-column">
      <style:table-column-properties style:column-width="16.228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1" style:family="table">
      <style:table-properties style:width="16.228cm" fo:margin-left="0.009cm" fo:margin-top="0cm" fo:margin-bottom="0cm" table:align="left" style:writing-mode="page"/>
    </style:style>
    <style:style style:name="表格31.A" style:family="table-column">
      <style:table-column-properties style:column-width="16.228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2" style:family="table">
      <style:table-properties style:width="16.228cm" fo:margin-left="0.009cm" fo:margin-top="0cm" fo:margin-bottom="0cm" table:align="left" style:writing-mode="page"/>
    </style:style>
    <style:style style:name="表格32.A" style:family="table-column">
      <style:table-column-properties style:column-width="16.228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fadbd8" fo:padding-left="0.353cm" fo:padding-right="0.353cm" fo:padding-top="0.212cm" fo:padding-bottom="0.212cm" fo:border="0.5pt solid #c0392b">
        <style:background-image/>
      </style:table-cell-properties>
    </style:style>
    <style:style style:name="表格33" style:family="table">
      <style:table-properties style:width="16.228cm" fo:margin-left="0.009cm" fo:margin-top="0cm" fo:margin-bottom="0cm" table:align="left" style:writing-mode="page"/>
    </style:style>
    <style:style style:name="表格33.A" style:family="table-column">
      <style:table-column-properties style:column-width="16.228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fadbd8" fo:padding-left="0.353cm" fo:padding-right="0.353cm" fo:padding-top="0.212cm" fo:padding-bottom="0.212cm" fo:border="0.5pt solid #c0392b">
        <style:background-image/>
      </style:table-cell-properties>
    </style:style>
    <style:style style:name="表格34" style:family="table">
      <style:table-properties style:width="16.228cm" fo:margin-left="0.009cm" fo:margin-top="0cm" fo:margin-bottom="0cm" table:align="left" style:writing-mode="page"/>
    </style:style>
    <style:style style:name="表格34.A" style:family="table-column">
      <style:table-column-properties style:column-width="16.228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5" style:family="table">
      <style:table-properties style:width="16.228cm" fo:margin-left="0.009cm" fo:margin-top="0cm" fo:margin-bottom="0cm" table:align="left" style:writing-mode="page"/>
    </style:style>
    <style:style style:name="表格35.A" style:family="table-column">
      <style:table-column-properties style:column-width="16.228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36" style:family="table">
      <style:table-properties style:width="16.228cm" fo:margin-left="0.009cm" fo:margin-top="0cm" fo:margin-bottom="0cm" table:align="left" style:writing-mode="page"/>
    </style:style>
    <style:style style:name="表格36.A" style:family="table-column">
      <style:table-column-properties style:column-width="16.228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1f3864" fo:padding-left="0.353cm" fo:padding-right="0.353cm" fo:padding-top="0.212cm" fo:padding-bottom="0.212cm" fo:border="0.5pt solid #1f3864">
        <style:background-image/>
      </style:table-cell-properties>
    </style:style>
    <style:style style:name="新增表格68" style:family="table">
      <style:table-properties style:width="16.228cm" fo:margin-left="0.009cm" fo:margin-top="0cm" fo:margin-bottom="0cm" table:align="left" style:writing-mode="page"/>
    </style:style>
    <style:style style:name="新增表格68.A" style:family="table-column">
      <style:table-column-properties style:column-width="16.228cm"/>
    </style:style>
    <style:style style:name="新增表格68.1" style:family="table-row">
      <style:table-row-properties fo:keep-together="auto"/>
    </style:style>
    <style:style style:name="新增表格68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新增表格69" style:family="table">
      <style:table-properties style:width="16.228cm" fo:margin-left="0.009cm" fo:margin-top="0cm" fo:margin-bottom="0cm" table:align="left" style:writing-mode="page"/>
    </style:style>
    <style:style style:name="新增表格69.A" style:family="table-column">
      <style:table-column-properties style:column-width="16.228cm"/>
    </style:style>
    <style:style style:name="新增表格69.1" style:family="table-row">
      <style:table-row-properties fo:keep-together="auto"/>
    </style:style>
    <style:style style:name="新增表格69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新增表格70" style:family="table">
      <style:table-properties style:width="16.228cm" fo:margin-left="0.009cm" fo:margin-top="0cm" fo:margin-bottom="0cm" table:align="left" style:writing-mode="page"/>
    </style:style>
    <style:style style:name="新增表格70.A" style:family="table-column">
      <style:table-column-properties style:column-width="16.228cm"/>
    </style:style>
    <style:style style:name="新增表格70.1" style:family="table-row">
      <style:table-row-properties fo:keep-together="auto"/>
    </style:style>
    <style:style style:name="新增表格70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新增表格71" style:family="table">
      <style:table-properties style:width="16.228cm" fo:margin-left="0.009cm" fo:margin-top="0cm" fo:margin-bottom="0cm" table:align="left" style:writing-mode="page"/>
    </style:style>
    <style:style style:name="新增表格71.A" style:family="table-column">
      <style:table-column-properties style:column-width="16.228cm"/>
    </style:style>
    <style:style style:name="新增表格71.1" style:family="table-row">
      <style:table-row-properties fo:keep-together="auto"/>
    </style:style>
    <style:style style:name="新增表格71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新增表格72" style:family="table">
      <style:table-properties style:width="16.228cm" fo:margin-left="0.009cm" fo:margin-top="0cm" fo:margin-bottom="0cm" table:align="left" style:writing-mode="page"/>
    </style:style>
    <style:style style:name="新增表格72.A" style:family="table-column">
      <style:table-column-properties style:column-width="2.82cm"/>
    </style:style>
    <style:style style:name="新增表格72.B" style:family="table-column">
      <style:table-column-properties style:column-width="3.881cm"/>
    </style:style>
    <style:style style:name="新增表格72.C" style:family="table-column">
      <style:table-column-properties style:column-width="3.528cm"/>
    </style:style>
    <style:style style:name="新增表格72.D" style:family="table-column">
      <style:table-column-properties style:column-width="5.999cm"/>
    </style:style>
    <style:style style:name="新增表格72.1" style:family="table-row">
      <style:table-row-properties fo:keep-together="auto"/>
    </style:style>
    <style:style style:name="新增表格72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新增表格72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新增表格72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新增表格72.A5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新增表格73" style:family="table">
      <style:table-properties style:width="16.228cm" fo:margin-left="0.009cm" fo:margin-top="0cm" fo:margin-bottom="0cm" table:align="left" style:writing-mode="page"/>
    </style:style>
    <style:style style:name="新增表格73.A" style:family="table-column">
      <style:table-column-properties style:column-width="16.228cm"/>
    </style:style>
    <style:style style:name="新增表格73.1" style:family="table-row">
      <style:table-row-properties fo:keep-together="auto"/>
    </style:style>
    <style:style style:name="新增表格73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新增表格74" style:family="table">
      <style:table-properties style:width="16.228cm" fo:margin-left="0.009cm" fo:margin-top="0cm" fo:margin-bottom="0cm" table:align="left" style:writing-mode="page"/>
    </style:style>
    <style:style style:name="新增表格74.A" style:family="table-column">
      <style:table-column-properties style:column-width="16.228cm"/>
    </style:style>
    <style:style style:name="新增表格74.1" style:family="table-row">
      <style:table-row-properties fo:keep-together="auto"/>
    </style:style>
    <style:style style:name="新增表格74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新增表格75" style:family="table">
      <style:table-properties style:width="16.228cm" fo:margin-left="0.009cm" fo:margin-top="0cm" fo:margin-bottom="0cm" table:align="left" style:writing-mode="page"/>
    </style:style>
    <style:style style:name="新增表格75.A" style:family="table-column">
      <style:table-column-properties style:column-width="16.228cm"/>
    </style:style>
    <style:style style:name="新增表格75.1" style:family="table-row">
      <style:table-row-properties fo:keep-together="auto"/>
    </style:style>
    <style:style style:name="新增表格75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37" style:family="table">
      <style:table-properties style:width="16.228cm" fo:margin-left="0.009cm" fo:margin-top="0cm" fo:margin-bottom="0cm" table:align="left" style:writing-mode="page"/>
    </style:style>
    <style:style style:name="表格37.A" style:family="table-column">
      <style:table-column-properties style:column-width="16.228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8" style:family="table">
      <style:table-properties style:width="16.228cm" fo:margin-left="0.009cm" fo:margin-top="0cm" fo:margin-bottom="0cm" table:align="left" style:writing-mode="page"/>
    </style:style>
    <style:style style:name="表格38.A" style:family="table-column">
      <style:table-column-properties style:column-width="16.228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39" style:family="table">
      <style:table-properties style:width="16.228cm" fo:margin-left="0.009cm" fo:margin-top="0cm" fo:margin-bottom="0cm" table:align="left" style:writing-mode="page"/>
    </style:style>
    <style:style style:name="表格39.A" style:family="table-column">
      <style:table-column-properties style:column-width="16.228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40" style:family="table">
      <style:table-properties style:width="16.228cm" fo:margin-left="0.009cm" fo:margin-top="0cm" fo:margin-bottom="0cm" table:align="left" style:writing-mode="page"/>
    </style:style>
    <style:style style:name="表格40.A" style:family="table-column">
      <style:table-column-properties style:column-width="16.228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41" style:family="table">
      <style:table-properties style:width="16.228cm" fo:margin-left="0.009cm" fo:margin-top="0cm" fo:margin-bottom="0cm" table:align="left" style:writing-mode="page"/>
    </style:style>
    <style:style style:name="表格41.A" style:family="table-column">
      <style:table-column-properties style:column-width="16.228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42" style:family="table">
      <style:table-properties style:width="16.228cm" fo:margin-left="0.009cm" fo:margin-top="0cm" fo:margin-bottom="0cm" table:align="left" style:writing-mode="page"/>
    </style:style>
    <style:style style:name="表格42.A" style:family="table-column">
      <style:table-column-properties style:column-width="16.228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1f3864" fo:padding-left="0.353cm" fo:padding-right="0.353cm" fo:padding-top="0.212cm" fo:padding-bottom="0.212cm" fo:border="0.5pt solid #1f3864">
        <style:background-image/>
      </style:table-cell-properties>
    </style:style>
    <style:style style:name="表格43" style:family="table">
      <style:table-properties style:width="16.228cm" fo:margin-left="0.009cm" fo:margin-top="0cm" fo:margin-bottom="0cm" table:align="left" style:writing-mode="page"/>
    </style:style>
    <style:style style:name="表格43.A" style:family="table-column">
      <style:table-column-properties style:column-width="16.228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新增表格76" style:family="table">
      <style:table-properties style:width="16.228cm" fo:margin-left="0.009cm" fo:margin-top="0cm" fo:margin-bottom="0cm" table:align="left" style:writing-mode="page"/>
    </style:style>
    <style:style style:name="新增表格76.A" style:family="table-column">
      <style:table-column-properties style:column-width="16.228cm"/>
    </style:style>
    <style:style style:name="新增表格76.1" style:family="table-row">
      <style:table-row-properties fo:keep-together="auto"/>
    </style:style>
    <style:style style:name="新增表格76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新增表格77" style:family="table">
      <style:table-properties style:width="16.228cm" fo:margin-left="0.009cm" fo:margin-top="0cm" fo:margin-bottom="0cm" table:align="left" style:writing-mode="page"/>
    </style:style>
    <style:style style:name="新增表格77.A" style:family="table-column">
      <style:table-column-properties style:column-width="16.228cm"/>
    </style:style>
    <style:style style:name="新增表格77.1" style:family="table-row">
      <style:table-row-properties fo:keep-together="auto"/>
    </style:style>
    <style:style style:name="新增表格77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新增表格78" style:family="table">
      <style:table-properties style:width="16.228cm" fo:margin-left="0.009cm" fo:margin-top="0cm" fo:margin-bottom="0cm" table:align="left" style:writing-mode="page"/>
    </style:style>
    <style:style style:name="新增表格78.A" style:family="table-column">
      <style:table-column-properties style:column-width="2.82cm"/>
    </style:style>
    <style:style style:name="新增表格78.B" style:family="table-column">
      <style:table-column-properties style:column-width="3.881cm"/>
    </style:style>
    <style:style style:name="新增表格78.C" style:family="table-column">
      <style:table-column-properties style:column-width="3.528cm"/>
    </style:style>
    <style:style style:name="新增表格78.D" style:family="table-column">
      <style:table-column-properties style:column-width="5.999cm"/>
    </style:style>
    <style:style style:name="新增表格78.1" style:family="table-row">
      <style:table-row-properties fo:keep-together="auto"/>
    </style:style>
    <style:style style:name="新增表格78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新增表格78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新增表格78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新增表格78.A6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新增表格79" style:family="table">
      <style:table-properties style:width="16.228cm" fo:margin-left="0.009cm" fo:margin-top="0cm" fo:margin-bottom="0cm" table:align="left" style:writing-mode="page"/>
    </style:style>
    <style:style style:name="新增表格79.A" style:family="table-column">
      <style:table-column-properties style:column-width="16.228cm"/>
    </style:style>
    <style:style style:name="新增表格79.1" style:family="table-row">
      <style:table-row-properties fo:keep-together="auto"/>
    </style:style>
    <style:style style:name="新增表格79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新增表格80" style:family="table">
      <style:table-properties style:width="16.228cm" fo:margin-left="0.009cm" fo:margin-top="0cm" fo:margin-bottom="0cm" table:align="left" style:writing-mode="page"/>
    </style:style>
    <style:style style:name="新增表格80.A" style:family="table-column">
      <style:table-column-properties style:column-width="16.228cm"/>
    </style:style>
    <style:style style:name="新增表格80.1" style:family="table-row">
      <style:table-row-properties fo:keep-together="auto"/>
    </style:style>
    <style:style style:name="新增表格80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新增表格81" style:family="table">
      <style:table-properties style:width="16.228cm" fo:margin-left="0.009cm" fo:margin-top="0cm" fo:margin-bottom="0cm" table:align="left" style:writing-mode="page"/>
    </style:style>
    <style:style style:name="新增表格81.A" style:family="table-column">
      <style:table-column-properties style:column-width="16.228cm"/>
    </style:style>
    <style:style style:name="新增表格81.1" style:family="table-row">
      <style:table-row-properties fo:keep-together="auto"/>
    </style:style>
    <style:style style:name="新增表格81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新增表格82" style:family="table">
      <style:table-properties style:width="16.228cm" fo:margin-left="0.009cm" fo:margin-top="0cm" fo:margin-bottom="0cm" table:align="left" style:writing-mode="page"/>
    </style:style>
    <style:style style:name="新增表格82.A" style:family="table-column">
      <style:table-column-properties style:column-width="16.228cm"/>
    </style:style>
    <style:style style:name="新增表格82.1" style:family="table-row">
      <style:table-row-properties fo:keep-together="auto"/>
    </style:style>
    <style:style style:name="新增表格82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44" style:family="table">
      <style:table-properties style:width="16.228cm" fo:margin-left="0.009cm" fo:margin-top="0cm" fo:margin-bottom="0cm" table:align="left" style:writing-mode="page"/>
    </style:style>
    <style:style style:name="表格44.A" style:family="table-column">
      <style:table-column-properties style:column-width="16.228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45" style:family="table">
      <style:table-properties style:width="16.228cm" fo:margin-left="0.009cm" fo:margin-top="0cm" fo:margin-bottom="0cm" table:align="left" style:writing-mode="page"/>
    </style:style>
    <style:style style:name="表格45.A" style:family="table-column">
      <style:table-column-properties style:column-width="16.228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46" style:family="table">
      <style:table-properties style:width="16.228cm" fo:margin-left="0.009cm" fo:margin-top="0cm" fo:margin-bottom="0cm" table:align="left" style:writing-mode="page"/>
    </style:style>
    <style:style style:name="表格46.A" style:family="table-column">
      <style:table-column-properties style:column-width="16.228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47" style:family="table">
      <style:table-properties style:width="16.228cm" fo:margin-left="0.009cm" fo:margin-top="0cm" fo:margin-bottom="0cm" table:align="left" style:writing-mode="page"/>
    </style:style>
    <style:style style:name="表格47.A" style:family="table-column">
      <style:table-column-properties style:column-width="16.228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48" style:family="table">
      <style:table-properties style:width="16.228cm" fo:margin-left="0.009cm" fo:margin-top="0cm" fo:margin-bottom="0cm" table:align="left" style:writing-mode="page"/>
    </style:style>
    <style:style style:name="表格48.A" style:family="table-column">
      <style:table-column-properties style:column-width="16.228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49" style:family="table">
      <style:table-properties style:width="16.228cm" fo:margin-left="0.009cm" fo:margin-top="0cm" fo:margin-bottom="0cm" table:align="left" style:writing-mode="page"/>
    </style:style>
    <style:style style:name="表格49.A" style:family="table-column">
      <style:table-column-properties style:column-width="16.228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fadbd8" fo:padding-left="0.353cm" fo:padding-right="0.353cm" fo:padding-top="0.212cm" fo:padding-bottom="0.212cm" fo:border="0.5pt solid #c0392b">
        <style:background-image/>
      </style:table-cell-properties>
    </style:style>
    <style:style style:name="表格50" style:family="table">
      <style:table-properties style:width="16.228cm" fo:margin-left="0.009cm" fo:margin-top="0cm" fo:margin-bottom="0cm" table:align="left" style:writing-mode="page"/>
    </style:style>
    <style:style style:name="表格50.A" style:family="table-column">
      <style:table-column-properties style:column-width="16.228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51" style:family="table">
      <style:table-properties style:width="16.228cm" fo:margin-left="0.009cm" fo:margin-top="0cm" fo:margin-bottom="0cm" table:align="left" style:writing-mode="page"/>
    </style:style>
    <style:style style:name="表格51.A" style:family="table-column">
      <style:table-column-properties style:column-width="16.228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52" style:family="table">
      <style:table-properties style:width="16.228cm" fo:margin-left="0.009cm" fo:margin-top="0cm" fo:margin-bottom="0cm" table:align="left" style:writing-mode="page"/>
    </style:style>
    <style:style style:name="表格52.A" style:family="table-column">
      <style:table-column-properties style:column-width="16.228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53" style:family="table">
      <style:table-properties style:width="16.228cm" fo:margin-left="0.009cm" fo:margin-top="0cm" fo:margin-bottom="0cm" table:align="left" style:writing-mode="page"/>
    </style:style>
    <style:style style:name="表格53.A" style:family="table-column">
      <style:table-column-properties style:column-width="16.228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fadbd8" fo:padding-left="0.353cm" fo:padding-right="0.353cm" fo:padding-top="0.212cm" fo:padding-bottom="0.212cm" fo:border="0.5pt solid #c0392b">
        <style:background-image/>
      </style:table-cell-properties>
    </style:style>
    <style:style style:name="表格54" style:family="table">
      <style:table-properties style:width="16.228cm" fo:margin-left="0.009cm" fo:margin-top="0cm" fo:margin-bottom="0cm" table:align="left" style:writing-mode="page"/>
    </style:style>
    <style:style style:name="表格54.A" style:family="table-column">
      <style:table-column-properties style:column-width="16.228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55" style:family="table">
      <style:table-properties style:width="16.228cm" fo:margin-left="0.009cm" fo:margin-top="0cm" fo:margin-bottom="0cm" table:align="left" style:writing-mode="page"/>
    </style:style>
    <style:style style:name="表格55.A" style:family="table-column">
      <style:table-column-properties style:column-width="16.228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56" style:family="table">
      <style:table-properties style:width="16.228cm" fo:margin-left="0.009cm" fo:margin-top="0cm" fo:margin-bottom="0cm" table:align="left" style:writing-mode="page"/>
    </style:style>
    <style:style style:name="表格56.A" style:family="table-column">
      <style:table-column-properties style:column-width="16.228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57" style:family="table">
      <style:table-properties style:width="16.228cm" fo:margin-left="0.009cm" fo:margin-top="0cm" fo:margin-bottom="0cm" table:align="left" style:writing-mode="page"/>
    </style:style>
    <style:style style:name="表格57.A" style:family="table-column">
      <style:table-column-properties style:column-width="16.228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58" style:family="table">
      <style:table-properties style:width="16.228cm" fo:margin-left="0.009cm" fo:margin-top="0cm" fo:margin-bottom="0cm" table:align="left" style:writing-mode="page"/>
    </style:style>
    <style:style style:name="表格58.A" style:family="table-column">
      <style:table-column-properties style:column-width="16.228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e8daef" fo:padding-left="0.353cm" fo:padding-right="0.353cm" fo:padding-top="0.212cm" fo:padding-bottom="0.212cm" fo:border="0.5pt solid #8e44ad">
        <style:background-image/>
      </style:table-cell-properties>
    </style:style>
    <style:style style:name="表格59" style:family="table">
      <style:table-properties style:width="16.228cm" fo:margin-left="0.009cm" fo:margin-top="0cm" fo:margin-bottom="0cm" table:align="left" style:writing-mode="page"/>
    </style:style>
    <style:style style:name="表格59.A" style:family="table-column">
      <style:table-column-properties style:column-width="16.228cm"/>
    </style:style>
    <style:style style:name="表格59.1" style:family="table-row">
      <style:table-row-properties fo:keep-together="auto"/>
    </style:style>
    <style:style style:name="表格59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60" style:family="table">
      <style:table-properties style:width="16.228cm" fo:margin-left="0.009cm" fo:margin-top="0cm" fo:margin-bottom="0cm" table:align="left" style:writing-mode="page"/>
    </style:style>
    <style:style style:name="表格60.A" style:family="table-column">
      <style:table-column-properties style:column-width="2.469cm"/>
    </style:style>
    <style:style style:name="表格60.B" style:family="table-column">
      <style:table-column-properties style:column-width="2.822cm"/>
    </style:style>
    <style:style style:name="表格60.C" style:family="table-column">
      <style:table-column-properties style:column-width="4.233cm"/>
    </style:style>
    <style:style style:name="表格60.D" style:family="table-column">
      <style:table-column-properties style:column-width="3.526cm"/>
    </style:style>
    <style:style style:name="表格60.E" style:family="table-column">
      <style:table-column-properties style:column-width="3.177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表格60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表格60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表格61" style:family="table">
      <style:table-properties style:width="16.228cm" fo:margin-left="0.009cm" fo:margin-top="0cm" fo:margin-bottom="0cm" table:align="left" style:writing-mode="page"/>
    </style:style>
    <style:style style:name="表格61.A" style:family="table-column">
      <style:table-column-properties style:column-width="16.228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P1" style:family="paragraph" style:parent-style-name="Standard">
      <style:paragraph-properties fo:margin-top="0cm" fo:margin-bottom="0.106cm" style:contextual-spacing="false" fo:text-align="center" style:justify-single-word="false"/>
      <style:text-properties fo:color="#aeb6c0" loext:opacity="100%" style:font-name="Arial" fo:font-size="12pt" fo:font-style="normal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" style:family="paragraph" style:parent-style-name="Standard">
      <style:paragraph-properties fo:margin-top="0cm" fo:margin-bottom="0.071cm" style:contextual-spacing="false" fo:text-align="center" style:justify-single-word="false"/>
      <style:text-properties fo:color="#ffffff" loext:opacity="100%" style:font-name="Arial" fo:font-size="26pt" fo:font-style="normal" fo:font-weight="bold" style:font-name-asian="Arial2" style:font-size-asian="26pt" style:font-style-asian="normal" style:font-weight-asian="bold" style:font-name-complex="Arial2" style:font-size-complex="26pt" style:font-style-complex="normal" style:font-weight-complex="bold"/>
    </style:style>
    <style:style style:name="P3" style:family="paragraph" style:parent-style-name="Standard">
      <style:paragraph-properties fo:margin-top="0cm" fo:margin-bottom="0.141cm" style:contextual-spacing="false" fo:text-align="center" style:justify-single-word="false"/>
      <style:text-properties fo:color="#aeb6c0" loext:opacity="100%" style:font-name="Arial" fo:font-size="14pt" fo:font-style="italic" fo:font-weight="normal" style:font-name-asian="Arial2" style:font-size-asian="14pt" style:font-style-asian="italic" style:font-weight-asian="normal" style:font-name-complex="Arial2" style:font-size-complex="14pt" style:font-style-complex="italic" style:font-weight-complex="normal"/>
    </style:style>
    <style:style style:name="P4" style:family="paragraph" style:parent-style-name="Standard">
      <style:paragraph-properties fo:margin-top="0cm" fo:margin-bottom="0.106cm" style:contextual-spacing="false" fo:text-align="center" style:justify-single-word="false"/>
      <style:text-properties fo:color="#f9e79f" loext:opacity="100%" style:font-name="Arial" fo:font-size="12pt" fo:font-style="normal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fo:color="#aeb6c0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6" style:family="paragraph" style:parent-style-name="Standard">
      <style:paragraph-properties fo:margin-top="0.035cm" fo:margin-bottom="0.035cm" style:contextual-spacing="false" fo:text-align="left" style:justify-single-word="false"/>
    </style:style>
    <style:style style:name="P7" style:family="paragraph" style:parent-style-name="Standard">
      <style:paragraph-properties fo:margin-top="0cm" fo:margin-bottom="0.141cm" style:contextual-spacing="false" fo:text-align="left" style:justify-single-word="false"/>
      <style:text-properties fo:color="#1f3864" loext:opacity="100%" style:font-name="Arial" fo:font-size="11.5pt" fo:font-style="normal" fo:font-weight="bold" style:font-name-asian="Arial2" style:font-size-asian="11.5pt" style:font-style-asian="normal" style:font-weight-asian="bold" style:font-name-complex="Arial2" style:font-size-complex="11.5pt" style:font-style-complex="normal" style:font-weight-complex="bold"/>
    </style:style>
    <style:style style:name="P8" style:family="paragraph" style:parent-style-name="Standard">
      <style:paragraph-properties fo:margin-top="0.053cm" fo:margin-bottom="0.053cm" style:contextual-spacing="false" fo:text-align="left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9" style:family="paragraph" style:parent-style-name="Heading_20_1">
      <loext:graphic-properties draw:fill="solid" draw:fill-color="#1f3864"/>
      <style:paragraph-properties fo:margin-left="0.353cm" fo:margin-top="0cm" fo:margin-bottom="0.353cm" style:contextual-spacing="false" fo:break-before="page" fo:background-color="#1f3864"/>
      <style:text-properties fo:color="#ffffff" loext:opacity="100%" style:font-name="Arial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P10" style:family="paragraph" style:parent-style-name="Heading_20_2">
      <loext:graphic-properties draw:fill="solid" draw:fill-color="#2e75b6"/>
      <style:paragraph-properties fo:margin-left="0.282cm" fo:margin-top="0.423cm" fo:margin-bottom="0.282cm" style:contextual-spacing="false" fo:background-color="#2e75b6"/>
      <style:text-properties fo:color="#ffffff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11" style:family="paragraph" style:parent-style-name="Standard">
      <style:paragraph-properties fo:margin-top="0cm" fo:margin-bottom="0.141cm" style:contextual-spacing="false" fo:text-align="left" style:justify-single-word="false"/>
      <style:text-properties fo:color="#1f3864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12" style:family="paragraph" style:parent-style-name="Standard">
      <style:paragraph-properties fo:margin-top="0.053cm" fo:margin-bottom="0.053cm" style:contextual-spacing="false" fo:text-align="left" style:justify-single-word="false"/>
    </style:style>
    <style:style style:name="P13" style:family="paragraph" style:parent-style-name="Standard">
      <style:paragraph-properties fo:margin-top="0.053cm" fo:margin-bottom="0cm" style:contextual-spacing="false" fo:text-align="left" style:justify-single-word="false"/>
    </style:style>
    <style:style style:name="P14" style:family="paragraph" style:parent-style-name="Standard">
      <style:paragraph-properties fo:margin-top="0.106cm" fo:margin-bottom="0.106cm" style:contextual-spacing="false" fo:text-align="left" style:justify-single-word="false"/>
      <style:text-properties fo:color="#000000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15" style:family="paragraph" style:parent-style-name="Standard">
      <style:paragraph-properties fo:margin-top="0.035cm" fo:margin-bottom="0.035cm" style:contextual-spacing="false" fo:text-align="center" style:justify-single-word="false"/>
      <style:text-properties fo:color="#1f3864" loext:opacity="100%" style:font-name="Arial" fo:font-size="11.5pt" fo:font-style="normal" fo:font-weight="bold" style:font-name-asian="Arial2" style:font-size-asian="11.5pt" style:font-style-asian="normal" style:font-weight-asian="bold" style:font-name-complex="Arial2" style:font-size-complex="11.5pt" style:font-style-complex="normal" style:font-weight-complex="bold"/>
    </style:style>
    <style:style style:name="P16" style:family="paragraph" style:parent-style-name="Standard">
      <style:paragraph-properties fo:margin-left="1.411cm" fo:margin-top="0.018cm" fo:margin-bottom="0.018cm" style:contextual-spacing="false" fo:text-align="left" style:justify-single-word="false"/>
      <style:text-properties fo:color="#7f8c8d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17" style:family="paragraph" style:parent-style-name="Standard">
      <style:paragraph-properties fo:margin-top="0.141cm" fo:margin-bottom="0.071cm" style:contextual-spacing="false" fo:text-align="left" style:justify-single-word="false"/>
      <style:text-properties fo:color="#1f3864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18" style:family="paragraph" style:parent-style-name="Standard">
      <style:paragraph-properties fo:margin-top="0cm" fo:margin-bottom="0.106cm" style:contextual-spacing="false" fo:text-align="left" style:justify-single-word="false"/>
      <style:text-properties fo:color="#000000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19" style:family="paragraph" style:parent-style-name="Standard">
      <style:paragraph-properties fo:margin-top="0.035cm" fo:margin-bottom="0.106cm" style:contextual-spacing="false" fo:text-align="left" style:justify-single-word="false"/>
      <style:text-properties fo:color="#c0392b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20" style:family="paragraph" style:parent-style-name="Standard">
      <style:paragraph-properties fo:margin-top="0.018cm" fo:margin-bottom="0.018cm" style:contextual-spacing="false" fo:text-align="left" style:justify-single-word="false"/>
      <style:text-properties fo:color="#000000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21" style:family="paragraph" style:parent-style-name="Standard">
      <style:paragraph-properties fo:margin-top="0.018cm" fo:margin-bottom="0.071cm" style:contextual-spacing="false" fo:text-align="left" style:justify-single-word="false"/>
      <style:text-properties fo:color="#000000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22" style:family="paragraph" style:parent-style-name="Standard">
      <style:paragraph-properties fo:margin-top="0.035cm" fo:margin-bottom="0.035cm" style:contextual-spacing="false" fo:text-align="left" style:justify-single-word="false"/>
      <style:text-properties fo:color="#c0392b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3" style:family="paragraph" style:parent-style-name="Standard">
      <style:paragraph-properties fo:margin-top="0.035cm" fo:margin-bottom="0.106cm" style:contextual-spacing="false" fo:text-align="left" style:justify-single-word="false"/>
      <style:text-properties fo:color="#27ae60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24" style:family="paragraph" style:parent-style-name="Standard">
      <style:paragraph-properties fo:margin-top="0.035cm" fo:margin-bottom="0.035cm" style:contextual-spacing="false" fo:text-align="left" style:justify-single-word="false"/>
      <style:text-properties fo:color="#27ae60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5" style:family="paragraph" style:parent-style-name="Standard">
      <style:paragraph-properties fo:margin-top="0cm" fo:margin-bottom="0.106cm" style:contextual-spacing="false" fo:text-align="left" style:justify-single-word="false"/>
      <style:text-properties fo:color="#e67e22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26" style:family="paragraph" style:parent-style-name="Standard">
      <style:paragraph-properties fo:margin-top="0.035cm" fo:margin-bottom="0.053cm" style:contextual-spacing="false" fo:text-align="left" style:justify-single-word="false"/>
      <style:text-properties fo:color="#000000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27" style:family="paragraph" style:parent-style-name="Standard">
      <style:paragraph-properties fo:margin-left="0.635cm" fo:margin-top="0.018cm" fo:margin-bottom="0.018cm" style:contextual-spacing="false" fo:text-align="left" style:justify-single-word="false"/>
      <style:text-properties fo:color="#000000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28" style:family="paragraph" style:parent-style-name="Standard">
      <style:paragraph-properties fo:margin-left="0.635cm" fo:margin-top="0.018cm" fo:margin-bottom="0.071cm" style:contextual-spacing="false" fo:text-align="left" style:justify-single-word="false"/>
      <style:text-properties fo:color="#000000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29" style:family="paragraph" style:parent-style-name="Standard">
      <style:paragraph-properties fo:margin-top="0cm" fo:margin-bottom="0cm" style:contextual-spacing="false" fo:text-align="left" style:justify-single-word="false"/>
      <style:text-properties fo:color="#e67e22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30" style:family="paragraph" style:parent-style-name="Standard">
      <style:paragraph-properties fo:margin-top="0cm" fo:margin-bottom="0.071cm" style:contextual-spacing="false" fo:text-align="left" style:justify-single-word="false"/>
      <style:text-properties fo:color="#000000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31" style:family="paragraph" style:parent-style-name="Standard">
      <style:paragraph-properties fo:margin-top="0.035cm" fo:margin-bottom="0.071cm" style:contextual-spacing="false" fo:text-align="left" style:justify-single-word="false"/>
      <style:text-properties fo:color="#000000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32" style:family="paragraph" style:parent-style-name="Standard">
      <style:paragraph-properties fo:margin-top="0.018cm" fo:margin-bottom="0.018cm" style:contextual-spacing="false" fo:text-align="left" style:justify-single-word="false"/>
      <style:text-properties fo:color="#000000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33" style:family="paragraph" style:parent-style-name="Standard">
      <style:paragraph-properties fo:margin-top="0cm" fo:margin-bottom="0.106cm" style:contextual-spacing="false" fo:text-align="left" style:justify-single-word="false"/>
      <style:text-properties fo:color="#27ae60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34" style:family="paragraph" style:parent-style-name="Standard">
      <style:paragraph-properties fo:margin-top="0.035cm" fo:margin-bottom="0.035cm" style:contextual-spacing="false" fo:text-align="center" style:justify-single-word="false"/>
      <style:text-properties fo:color="#1f3864" loext:opacity="100%" style:font-name="Arial" fo:font-size="12pt" fo:font-style="normal" fo:font-weight="bold" style:font-name-asian="Arial2" style:font-size-asian="12pt" style:font-style-asian="normal" style:font-weight-asian="bold" style:font-name-complex="Arial2" style:font-size-complex="12pt" style:font-style-complex="normal" style:font-weight-complex="bold"/>
    </style:style>
    <style:style style:name="P35" style:family="paragraph" style:parent-style-name="Standard">
      <style:paragraph-properties fo:margin-top="0.071cm" fo:margin-bottom="0cm" style:contextual-spacing="false" fo:text-align="center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36" style:family="paragraph" style:parent-style-name="Standard">
      <style:paragraph-properties fo:margin-top="0cm" fo:margin-bottom="0.141cm" style:contextual-spacing="false" fo:text-align="left" style:justify-single-word="false"/>
      <style:text-properties fo:color="#1f3864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37" style:family="paragraph" style:parent-style-name="Standard">
      <style:paragraph-properties fo:margin-top="0.035cm" fo:margin-bottom="0.106cm" style:contextual-spacing="false" fo:text-align="left" style:justify-single-word="false"/>
      <style:text-properties fo:color="#000000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38" style:family="paragraph" style:parent-style-name="Standard">
      <style:paragraph-properties fo:margin-top="0.035cm" fo:margin-bottom="0.035cm" style:contextual-spacing="false" fo:text-align="left" style:justify-single-word="false"/>
      <style:text-properties fo:color="#27ae60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39" style:family="paragraph" style:parent-style-name="Standard">
      <style:paragraph-properties fo:margin-top="0.035cm" fo:margin-bottom="0cm" style:contextual-spacing="false" fo:text-align="left" style:justify-single-word="false"/>
      <style:text-properties fo:color="#c0392b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40" style:family="paragraph" style:parent-style-name="Standard">
      <style:paragraph-properties fo:margin-top="0.035cm" fo:margin-bottom="0.106cm" style:contextual-spacing="false" fo:text-align="center" style:justify-single-word="false"/>
      <style:text-properties fo:color="#1f3864" loext:opacity="100%" style:font-name="Arial" fo:font-size="12pt" fo:font-style="normal" fo:font-weight="bold" style:font-name-asian="Arial2" style:font-size-asian="12pt" style:font-style-asian="normal" style:font-weight-asian="bold" style:font-name-complex="Arial2" style:font-size-complex="12pt" style:font-style-complex="normal" style:font-weight-complex="bold"/>
    </style:style>
    <style:style style:name="P41" style:family="paragraph" style:parent-style-name="Standard">
      <style:paragraph-properties fo:margin-top="0cm" fo:margin-bottom="0.035cm" style:contextual-spacing="false" fo:text-align="center" style:justify-single-word="false"/>
      <style:text-properties fo:color="#2e75b6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42" style:family="paragraph" style:parent-style-name="Standard">
      <style:paragraph-properties fo:margin-top="0.071cm" fo:margin-bottom="0.071cm" style:contextual-spacing="false" fo:text-align="left" style:justify-single-word="false"/>
      <style:text-properties fo:color="#1f3864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43" style:family="paragraph" style:parent-style-name="Standard">
      <style:paragraph-properties fo:margin-left="0.635cm" fo:margin-top="0.071cm" fo:margin-bottom="0.071cm" style:contextual-spacing="false" fo:text-align="left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44" style:family="paragraph" style:parent-style-name="Standard">
      <style:paragraph-properties fo:margin-left="0.635cm" fo:margin-top="0.071cm" fo:margin-bottom="0.071cm" style:contextual-spacing="false" fo:text-align="left" style:justify-single-word="false"/>
      <style:text-properties fo:color="#27ae60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45" style:family="paragraph" style:parent-style-name="Standard">
      <style:paragraph-properties fo:margin-top="0.018cm" fo:margin-bottom="0.018cm" style:contextual-spacing="false" fo:text-align="left" style:justify-single-word="false"/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6" style:family="paragraph" style:parent-style-name="Standard">
      <style:paragraph-properties fo:margin-top="0.009cm" fo:margin-bottom="0.009cm" style:contextual-spacing="false" fo:text-align="left" style:justify-single-word="false"/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7" style:family="paragraph" style:parent-style-name="Standard">
      <style:paragraph-properties fo:margin-top="0.009cm" fo:margin-bottom="0.009cm" style:contextual-spacing="false" fo:text-align="left" style:justify-single-word="false"/>
    </style:style>
    <style:style style:name="P48" style:family="paragraph" style:parent-style-name="Standard">
      <style:paragraph-properties fo:margin-top="0.009cm" fo:margin-bottom="0.053cm" style:contextual-spacing="false" fo:text-align="left" style:justify-single-word="false"/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9" style:family="paragraph" style:parent-style-name="Standard">
      <style:paragraph-properties fo:margin-top="0.009cm" fo:margin-bottom="0.035cm" style:contextual-spacing="false" fo:text-align="left" style:justify-single-word="false"/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50" style:family="paragraph" style:parent-style-name="Standard">
      <style:paragraph-properties fo:margin-top="0.018cm" fo:margin-bottom="0.018cm" style:contextual-spacing="false" fo:text-align="left" style:justify-single-word="false"/>
      <style:text-properties fo:color="#c0392b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51" style:family="paragraph" style:parent-style-name="Standard">
      <style:paragraph-properties fo:margin-top="0.035cm" fo:margin-bottom="0cm" style:contextual-spacing="false" fo:text-align="left" style:justify-single-word="false"/>
      <style:text-properties fo:color="#27ae60" loext:opacity="100%" style:font-name="Arial" fo:font-size="10pt" fo:font-style="normal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52" style:family="paragraph" style:parent-style-name="Standard">
      <style:paragraph-properties fo:margin-top="0.035cm" fo:margin-bottom="0.035cm" style:contextual-spacing="false" fo:text-align="left" style:justify-single-word="false"/>
      <style:text-properties fo:color="#ffffff" loext:opacity="100%" style:font-name="Arial" fo:font-size="9pt" fo:font-style="normal" fo:font-weight="bold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P53" style:family="paragraph" style:parent-style-name="Standard">
      <style:paragraph-properties fo:margin-top="0.035cm" fo:margin-bottom="0.035cm" style:contextual-spacing="false" fo:text-align="left" style:justify-single-word="false"/>
      <style:text-properties fo:color="#000000" loext:opacity="100%" style:font-name="Arial" fo:font-size="9pt" fo:font-style="normal" fo:font-weight="normal" style:font-name-asian="Arial2" style:font-size-asian="9pt" style:font-style-asian="normal" style:font-weight-asian="normal" style:font-name-complex="Arial2" style:font-size-complex="9pt" style:font-style-complex="normal" style:font-weight-complex="normal"/>
    </style:style>
    <style:style style:name="P54" style:family="paragraph" style:parent-style-name="Standard">
      <style:paragraph-properties fo:margin-top="0.035cm" fo:margin-bottom="0.035cm" style:contextual-spacing="false" fo:text-align="left" style:justify-single-word="false"/>
      <style:text-properties fo:color="#000000" loext:opacity="100%" style:font-name="Arial" fo:font-size="9pt" fo:font-style="normal" fo:font-weight="bold" fo:background-color="#ffd740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P55" style:family="paragraph" style:parent-style-name="Standard">
      <style:paragraph-properties fo:margin-top="0.035cm" fo:margin-bottom="0.035cm" style:contextual-spacing="false" fo:text-align="left" style:justify-single-word="false"/>
      <style:text-properties fo:color="#000000" loext:opacity="100%" style:font-name="Arial" fo:font-size="9pt" fo:font-style="normal" fo:font-weight="bold" fo:background-color="#1de9b6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P56" style:family="paragraph" style:parent-style-name="Standard">
      <style:paragraph-properties fo:margin-top="0.035cm" fo:margin-bottom="0.035cm" style:contextual-spacing="false" fo:text-align="left" style:justify-single-word="false"/>
      <style:text-properties fo:color="#000000" loext:opacity="100%" style:font-name="Arial" fo:font-size="9pt" fo:font-style="normal" fo:font-weight="bold" fo:background-color="#e040fb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P57" style:family="paragraph" style:parent-style-name="Standard">
      <style:paragraph-properties fo:margin-top="0.035cm" fo:margin-bottom="0.035cm" style:contextual-spacing="false" fo:text-align="left" style:justify-single-word="false"/>
      <style:text-properties fo:color="#ff3d00" loext:opacity="100%" style:font-name="Arial" fo:font-size="9pt" fo:font-style="normal" fo:font-weight="bold" fo:background-color="#64ffda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P58" style:family="paragraph" style:parent-style-name="Standard">
      <style:paragraph-properties fo:margin-top="0.035cm" fo:margin-bottom="0.035cm" style:contextual-spacing="false" fo:text-align="left" style:justify-single-word="false"/>
      <style:text-properties fo:color="#ffff00" loext:opacity="100%" style:font-name="Arial" fo:font-size="9pt" fo:font-style="normal" fo:font-weight="bold" fo:background-color="#ff1744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P59" style:family="paragraph" style:parent-style-name="Standard">
      <style:paragraph-properties fo:margin-top="0cm" fo:margin-bottom="0.106cm" style:contextual-spacing="false" fo:text-align="left" style:justify-single-word="false"/>
      <style:text-properties fo:color="#1f3864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60" style:family="paragraph" style:parent-style-name="Standard">
      <style:paragraph-properties fo:margin-top="0.035cm" fo:margin-bottom="0.071cm" style:contextual-spacing="false" fo:text-align="center" style:justify-single-word="false"/>
      <style:text-properties fo:color="#2e75b6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61" style:family="paragraph" style:parent-style-name="Standard">
      <style:paragraph-properties fo:margin-top="0.035cm" fo:margin-bottom="0cm" style:contextual-spacing="false" fo:text-align="center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62" style:family="paragraph" style:parent-style-name="Standard">
      <style:paragraph-properties fo:margin-top="0.014cm" fo:margin-bottom="0.014cm" style:contextual-spacing="false" fo:text-align="left" style:justify-single-word="false"/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63" style:family="paragraph" style:parent-style-name="Standard">
      <style:paragraph-properties fo:margin-top="0.106cm" fo:margin-bottom="0cm" style:contextual-spacing="false" fo:text-align="left" style:justify-single-word="false"/>
      <style:text-properties fo:color="#e67e22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64" style:family="paragraph" style:parent-style-name="Standard">
      <style:paragraph-properties fo:margin-top="0cm" fo:margin-bottom="0.106cm" style:contextual-spacing="false" fo:text-align="left" style:justify-single-word="false"/>
      <style:text-properties fo:color="#1f3864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65" style:family="paragraph" style:parent-style-name="Standard">
      <style:paragraph-properties fo:margin-top="0.018cm" fo:margin-bottom="0.018cm" style:contextual-spacing="false" fo:text-align="left" style:justify-single-word="false"/>
      <style:text-properties fo:color="#000000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66" style:family="paragraph" style:parent-style-name="Standard">
      <style:paragraph-properties fo:margin-top="0.009cm" fo:margin-bottom="0.009cm" style:contextual-spacing="false" fo:text-align="left" style:justify-single-word="false"/>
      <style:text-properties fo:color="#27ae60" loext:opacity="100%" style:font-name="Courier New" fo:font-size="10pt" fo:font-style="normal" fo:font-weight="bold" style:font-name-asian="Courier New1" style:font-size-asian="10pt" style:font-style-asian="normal" style:font-weight-asian="bold" style:font-name-complex="Courier New1" style:font-size-complex="10pt" style:font-style-complex="normal" style:font-weight-complex="bold"/>
    </style:style>
    <style:style style:name="P67" style:family="paragraph" style:parent-style-name="Standard">
      <style:paragraph-properties fo:margin-top="0.009cm" fo:margin-bottom="0.035cm" style:contextual-spacing="false" fo:text-align="left" style:justify-single-word="false"/>
      <style:text-properties fo:color="#000000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68" style:family="paragraph" style:parent-style-name="Standard">
      <style:paragraph-properties fo:margin-top="0.018cm" fo:margin-bottom="0cm" style:contextual-spacing="false" fo:text-align="left" style:justify-single-word="false"/>
      <style:text-properties fo:color="#000000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69" style:family="paragraph" style:parent-style-name="Standard">
      <style:paragraph-properties fo:margin-top="0.009cm" fo:margin-bottom="0.009cm" style:contextual-spacing="false" fo:text-align="left" style:justify-single-word="false"/>
      <style:text-properties fo:color="#000000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70" style:family="paragraph" style:parent-style-name="Standard">
      <style:paragraph-properties fo:margin-top="0.009cm" fo:margin-bottom="0.035cm" style:contextual-spacing="false" fo:text-align="left" style:justify-single-word="false"/>
      <style:text-properties fo:color="#c0392b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71" style:family="paragraph" style:parent-style-name="Standard">
      <style:paragraph-properties fo:margin-top="0.009cm" fo:margin-bottom="0.009cm" style:contextual-spacing="false" fo:text-align="left" style:justify-single-word="false"/>
      <style:text-properties fo:color="#c0392b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72" style:family="paragraph" style:parent-style-name="Standard">
      <style:paragraph-properties fo:margin-top="0.009cm" fo:margin-bottom="0.035cm" style:contextual-spacing="false" fo:text-align="left" style:justify-single-word="false"/>
      <style:text-properties fo:color="#27ae60" loext:opacity="100%" style:font-name="Courier New" fo:font-size="10pt" fo:font-style="normal" fo:font-weight="bold" style:font-name-asian="Courier New1" style:font-size-asian="10pt" style:font-style-asian="normal" style:font-weight-asian="bold" style:font-name-complex="Courier New1" style:font-size-complex="10pt" style:font-style-complex="normal" style:font-weight-complex="bold"/>
    </style:style>
    <style:style style:name="P73" style:family="paragraph" style:parent-style-name="Standard">
      <style:paragraph-properties fo:margin-top="0cm" fo:margin-bottom="0.071cm" style:contextual-spacing="false" fo:text-align="left" style:justify-single-word="false"/>
      <style:text-properties fo:color="#27ae60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74" style:family="paragraph" style:parent-style-name="Standard">
      <style:paragraph-properties fo:margin-top="0.018cm" fo:margin-bottom="0.018cm" style:contextual-spacing="false" fo:text-align="left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75" style:family="paragraph" style:parent-style-name="Standard">
      <style:paragraph-properties fo:margin-top="0.018cm" fo:margin-bottom="0.018cm" style:contextual-spacing="false" fo:text-align="left" style:justify-single-word="false"/>
      <style:text-properties fo:color="#000000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76" style:family="paragraph" style:parent-style-name="Standard">
      <style:paragraph-properties fo:margin-top="0.018cm" fo:margin-bottom="0cm" style:contextual-spacing="false" fo:text-align="left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77" style:family="paragraph" style:parent-style-name="Standard">
      <style:paragraph-properties fo:margin-top="0.018cm" fo:margin-bottom="0.035cm" style:contextual-spacing="false" fo:text-align="left" style:justify-single-word="false"/>
      <style:text-properties fo:color="#000000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78" style:family="paragraph" style:parent-style-name="Standard">
      <style:paragraph-properties fo:margin-top="0.018cm" fo:margin-bottom="0cm" style:contextual-spacing="false" fo:text-align="left" style:justify-single-word="false"/>
      <style:text-properties fo:color="#27ae60" loext:opacity="100%" style:font-name="Arial" fo:font-size="10pt" fo:font-style="normal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79" style:family="paragraph" style:parent-style-name="Standard">
      <style:paragraph-properties fo:margin-top="0.014cm" fo:margin-bottom="0.014cm" style:contextual-spacing="false" fo:text-align="left" style:justify-single-word="false"/>
      <style:text-properties fo:color="#d6e4f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80" style:family="paragraph" style:parent-style-name="Standard">
      <style:paragraph-properties fo:margin-top="0.014cm" fo:margin-bottom="0.014cm" style:contextual-spacing="false" fo:text-align="left" style:justify-single-word="false"/>
    </style:style>
    <style:style style:name="P81" style:family="paragraph" style:parent-style-name="Standard">
      <style:paragraph-properties fo:margin-top="0.035cm" fo:margin-bottom="0.035cm" style:contextual-spacing="false" fo:text-align="left" style:justify-single-word="false"/>
      <style:text-properties fo:color="#ffffff" loext:opacity="100%" style:font-name="Arial" fo:font-size="10pt" fo:font-style="normal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82" style:family="paragraph" style:parent-style-name="Standard">
      <style:paragraph-properties fo:margin-top="0.035cm" fo:margin-bottom="0.035cm" style:contextual-spacing="false" fo:text-align="left" style:justify-single-word="false"/>
      <style:text-properties fo:color="#000000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83" style:family="paragraph" style:parent-style-name="Standard">
      <style:paragraph-properties fo:margin-top="0.011cm" fo:margin-bottom="0.011cm" style:contextual-spacing="false" fo:text-align="left" style:justify-single-word="false"/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84" style:family="paragraph" style:parent-style-name="Standard">
      <style:paragraph-properties fo:margin-top="0.011cm" fo:margin-bottom="0.011cm" style:contextual-spacing="false" fo:text-align="left" style:justify-single-word="false"/>
    </style:style>
    <style:style style:name="P85" style:family="paragraph" style:parent-style-name="Standard">
      <style:paragraph-properties fo:margin-top="0cm" fo:margin-bottom="0.071cm" style:contextual-spacing="false" fo:text-align="left" style:justify-single-word="false"/>
      <style:text-properties fo:color="#1f3864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86" style:family="paragraph" style:parent-style-name="Standard">
      <style:paragraph-properties fo:margin-top="0cm" fo:margin-bottom="0.071cm" style:contextual-spacing="false" fo:text-align="left" style:justify-single-word="false"/>
      <style:text-properties fo:color="#c0392b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87" style:family="paragraph" style:parent-style-name="Heading_20_2">
      <loext:graphic-properties draw:fill="solid" draw:fill-color="#2e75b6"/>
      <style:paragraph-properties fo:margin-left="0.282cm" fo:margin-top="0.423cm" fo:margin-bottom="0.282cm" style:contextual-spacing="false" fo:background-color="#2e75b6"/>
    </style:style>
    <style:style style:name="P88" style:family="paragraph" style:parent-style-name="Standard">
      <style:paragraph-properties fo:margin-top="0.011cm" fo:margin-bottom="0.011cm" style:contextual-spacing="false" fo:text-align="left" style:justify-single-word="false"/>
      <style:text-properties fo:color="#000000" loext:opacity="100%" style:font-name="Courier New" fo:font-size="9.5pt" fo:font-style="normal" fo:font-weight="normal" style:font-name-asian="Courier New1" style:font-size-asian="9.5pt" style:font-style-asian="normal" style:font-weight-asian="normal" style:font-name-complex="Courier New1" style:font-size-complex="9.5pt" style:font-style-complex="normal" style:font-weight-complex="normal"/>
    </style:style>
    <style:style style:name="P89" style:family="paragraph" style:parent-style-name="Standard">
      <style:paragraph-properties fo:margin-top="0.018cm" fo:margin-bottom="0.035cm" style:contextual-spacing="false" fo:text-align="left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90" style:family="paragraph" style:parent-style-name="Standard">
      <style:paragraph-properties fo:margin-top="0.009cm" fo:margin-bottom="0.009cm" style:contextual-spacing="false" fo:text-align="left" style:justify-single-word="false"/>
      <style:text-properties fo:color="#c0392b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91" style:family="paragraph" style:parent-style-name="Standard">
      <style:paragraph-properties fo:margin-top="0.009cm" fo:margin-bottom="0cm" style:contextual-spacing="false" fo:text-align="left" style:justify-single-word="false"/>
      <style:text-properties fo:color="#c0392b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92" style:family="paragraph" style:parent-style-name="Standard">
      <style:paragraph-properties fo:margin-top="0.035cm" fo:margin-bottom="0.035cm" style:contextual-spacing="false" fo:text-align="left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93" style:family="paragraph" style:parent-style-name="Standard">
      <style:paragraph-properties fo:margin-top="0.035cm" fo:margin-bottom="0cm" style:contextual-spacing="false" fo:text-align="left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94" style:family="paragraph" style:parent-style-name="Standard">
      <style:paragraph-properties fo:margin-top="0.035cm" fo:margin-bottom="0.035cm" style:contextual-spacing="false" fo:text-align="left" style:justify-single-word="false"/>
      <style:text-properties fo:color="#ffffff" loext:opacity="100%" style:font-name="Arial" fo:font-size="9.5pt" fo:font-style="normal" fo:font-weight="bold" style:font-name-asian="Arial2" style:font-size-asian="9.5pt" style:font-style-asian="normal" style:font-weight-asian="bold" style:font-name-complex="Arial2" style:font-size-complex="9.5pt" style:font-style-complex="normal" style:font-weight-complex="bold"/>
    </style:style>
    <style:style style:name="P95" style:family="paragraph" style:parent-style-name="Standard">
      <style:paragraph-properties fo:margin-top="0.035cm" fo:margin-bottom="0.035cm" style:contextual-spacing="false" fo:text-align="left" style:justify-single-word="false"/>
      <style:text-properties fo:color="#000000" loext:opacity="100%" style:font-name="Arial" fo:font-size="9.5pt" fo:font-style="normal" fo:font-weight="normal" style:font-name-asian="Arial2" style:font-size-asian="9.5pt" style:font-style-asian="normal" style:font-weight-asian="normal" style:font-name-complex="Arial2" style:font-size-complex="9.5pt" style:font-style-complex="normal" style:font-weight-complex="normal"/>
    </style:style>
    <style:style style:name="P96" style:family="paragraph" style:parent-style-name="Standard">
      <style:paragraph-properties fo:margin-top="0.035cm" fo:margin-bottom="0.071cm" style:contextual-spacing="false" fo:text-align="left" style:justify-single-word="false"/>
      <style:text-properties fo:color="#000000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97" style:family="paragraph" style:parent-style-name="Standard">
      <style:paragraph-properties fo:margin-top="0.035cm" fo:margin-bottom="0cm" style:contextual-spacing="false" fo:text-align="center" style:justify-single-word="false"/>
      <style:text-properties fo:color="#1f3864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98" style:family="paragraph" style:parent-style-name="Standard">
      <style:paragraph-properties fo:margin-top="0.106cm" fo:margin-bottom="0.035cm" style:contextual-spacing="false" fo:text-align="center" style:justify-single-word="false"/>
      <style:text-properties fo:color="#7f8c8d" loext:opacity="100%" style:font-name="Arial" fo:font-size="9pt" fo:font-style="normal" fo:font-weight="normal" style:font-name-asian="Arial2" style:font-size-asian="9pt" style:font-style-asian="normal" style:font-weight-asian="normal" style:font-name-complex="Arial2" style:font-size-complex="9pt" style:font-style-complex="normal" style:font-weight-complex="normal"/>
    </style:style>
    <style:style style:name="P99" style:family="paragraph" style:parent-style-name="Standard">
      <style:paragraph-properties fo:margin-top="0cm" fo:margin-bottom="0cm" style:contextual-spacing="false" fo:text-align="center" style:justify-single-word="false"/>
      <style:text-properties fo:color="#1f3864" loext:opacity="100%" style:font-name="Arial" fo:font-size="9pt" fo:font-style="normal" fo:font-weight="bold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T1" style:family="text">
      <style:text-properties fo:color="#000000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2" style:family="text"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T3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4" style:family="text">
      <style:text-properties fo:color="#ffea00" loext:opacity="100%" fo:font-weight="bold" fo:background-color="#3d5afe" loext:char-shading-value="0" style:font-weight-asian="bold" style:font-weight-complex="bold"/>
    </style:style>
    <style:style style:name="T5" style:family="text">
      <style:text-properties fo:color="#18ffff" loext:opacity="100%" fo:background-color="#d500f9" loext:char-shading-value="0"/>
    </style:style>
    <style:style style:name="T6" style:family="text">
      <style:text-properties fo:color="#1de9b6" loext:opacity="100%" fo:background-color="#6d4c41" loext:char-shading-value="0"/>
    </style:style>
    <style:style style:name="T7" style:family="text">
      <style:text-properties fo:color="#c6ff00" loext:opacity="100%" fo:font-weight="bold" fo:background-color="#f50057" loext:char-shading-value="0" style:font-weight-asian="bold" style:font-weight-complex="bold"/>
    </style:style>
    <style:style style:name="T8" style:family="text">
      <style:text-properties fo:font-weight="bold" fo:background-color="#ffd740" loext:char-shading-value="0" style:font-weight-asian="bold" style:font-weight-complex="bold"/>
    </style:style>
    <style:style style:name="T9" style:family="text">
      <style:text-properties fo:color="#c6ff00" loext:opacity="100%" fo:font-weight="bold" fo:background-color="#f50057" loext:char-shading-value="0" style:font-weight-asian="bold" style:font-weight-complex="bold"/>
    </style:style>
    <style:style style:name="T10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11" style:family="text">
      <style:text-properties fo:color="#ffff00" loext:opacity="100%" fo:font-weight="bold" fo:background-color="#ff1744" loext:char-shading-value="0" style:font-weight-asian="bold" style:font-weight-complex="bold"/>
    </style:style>
    <style:style style:name="T12" style:family="text">
      <style:text-properties fo:font-weight="bold" fo:background-color="#ffff00" loext:char-shading-value="0" style:font-weight-asian="bold" style:font-weight-complex="bold"/>
    </style:style>
    <style:style style:name="T13" style:family="text">
      <style:text-properties fo:background-color="#ffff00" loext:char-shading-value="0"/>
    </style:style>
    <style:style style:name="T14" style:family="text">
      <style:text-properties fo:color="#ffd740" loext:opacity="100%" fo:background-color="#000000" loext:char-shading-value="0"/>
    </style:style>
    <style:style style:name="T15" style:family="text">
      <style:text-properties fo:color="#c6ff00" loext:opacity="100%" fo:background-color="#000000" loext:char-shading-value="0"/>
    </style:style>
    <style:style style:name="T16" style:family="text">
      <style:text-properties fo:font-weight="bold" fo:background-color="#c6ff00" loext:char-shading-value="0" style:font-weight-asian="bold" style:font-weight-complex="bold"/>
    </style:style>
    <style:style style:name="T17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8" style:family="text"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19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20" style:family="text">
      <style:text-properties fo:color="#1de9b6" loext:opacity="100%" fo:font-weight="bold" fo:background-color="#000000" loext:char-shading-value="0" style:font-weight-asian="bold" style:font-weight-complex="bold"/>
    </style:style>
    <style:style style:name="T21" style:family="text">
      <style:text-properties fo:color="#e040fb" loext:opacity="100%" fo:font-weight="bold" fo:background-color="#000000" loext:char-shading-value="0" style:font-weight-asian="bold" style:font-weight-complex="bold"/>
    </style:style>
    <style:style style:name="T22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23" style:family="text">
      <style:text-properties fo:font-weight="bold" fo:background-color="#ffff00" loext:char-shading-value="0" style:font-weight-asian="bold" style:font-weight-complex="bold"/>
    </style:style>
    <style:style style:name="T24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25" style:family="text">
      <style:text-properties fo:color="#00e676" loext:opacity="100%" fo:font-weight="bold" style:font-weight-asian="bold" style:font-weight-complex="bold"/>
    </style:style>
    <style:style style:name="T26" style:family="text">
      <style:text-properties fo:color="#1de9b6" loext:opacity="100%" fo:font-weight="bold" fo:background-color="#6d4c41" loext:char-shading-value="0" style:font-weight-asian="bold" style:font-weight-complex="bold"/>
    </style:style>
    <style:style style:name="T27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28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29" style:family="text">
      <style:text-properties fo:color="#c6ff00" loext:opacity="100%" fo:font-weight="bold" fo:background-color="#ff1744" loext:char-shading-value="0" style:font-weight-asian="bold" style:font-weight-complex="bold"/>
    </style:style>
    <style:style style:name="T30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31" style:family="text">
      <style:text-properties fo:background-color="#000000" loext:char-shading-value="0"/>
    </style:style>
    <style:style style:name="T32" style:family="text">
      <style:text-properties fo:color="#c0392b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33" style:family="text">
      <style:text-properties fo:color="#d6e4f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34" style:family="text">
      <style:text-properties fo:color="#ffffff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">第 15 章</text:p>
            <text:p text:style-name="P2">最小擴張樹 MST</text:p>
            <text:p text:style-name="P3">Minimum Spanning Tree</text:p>
            <text:p text:style-name="P4">Prim <text:s/>／ <text:s/>Kruskal <text:s/>／ <text:s/>Sollin（Borůvka）</text:p>
            <text:p text:style-name="P5">圖解 × 逐步推導 × 程式實作 × 公職考試完整版</text:p>
          </table:table-cell>
        </table:table-row>
      </table:table>
      <text:p text:style-name="P6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7">📖 本章學習地圖</text:p>
            <text:p text:style-name="P8">第一章：MST 是什麼？基本概念 + 名詞解釋</text:p>
            <text:p text:style-name="P8">第二章：三種演算法快速比較表</text:p>
            <text:p text:style-name="P8">第三章：Prim 演算法 ── 圖解 + 逐步推導 + Python 程式碼</text:p>
            <text:p text:style-name="P8">第四章：Kruskal 演算法 ── 圖解 + Union-Find + Python 程式碼</text:p>
            <text:p text:style-name="P8">第五章：Sollin 演算法 ── 圖解 + 逐步推導 + Python 程式碼</text:p>
            <text:p text:style-name="P8">第六章：113閩 Q5 公職真題完整解題</text:p>
            <text:p text:style-name="P8">第七章：考試速查卡（背誦版）</text:p>
          </table:table-cell>
        </table:table-row>
      </table:table>
      <text:p text:style-name="P6"/>
      <text:p text:style-name="Standard"/>
      <text:h text:style-name="P9" text:outline-level="1">一、MST 基本概念 ── 新手從這裡開始</text:h>
      <text:p text:style-name="P6"/>
      <text:h text:style-name="P10" text:outline-level="2">1-1 先搞懂名詞：圖、節點、邊、權重</text:h>
      <text:p text:style-name="P6"/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1">📌 新手名詞解釋（一定要先懂這些！）</text:p>
            <text:p text:style-name="P12"><text:span text:style-name="T1">圖（Graph）：</text:span><text:span text:style-name="T2">由「點」和「線」組成的一種資料結構。例如：城市地圖就是一個圖。</text:span></text:p>
            <text:p text:style-name="P12"><text:span text:style-name="T1">節點（Node / Vertex）：</text:span><text:span text:style-name="T2">圖裡面的每個點。例如：城市 A、B、C。</text:span></text:p>
            <text:p text:style-name="P12"><text:span text:style-name="T1">邊（Edge）：</text:span><text:span text:style-name="T2">連接兩個節點的線段。例如：A 到 B 的道路。</text:span></text:p>
            <text:p text:style-name="P12"><text:span text:style-name="T1">權重（Weight）：</text:span><text:span text:style-name="T2">邊上的數字，代表距離、費用、時間等。例如：A 到 B 要走 3 公里。</text:span></text:p>
            <text:p text:style-name="P13"><text:span text:style-name="T1">連通圖（Connected Graph）：</text:span><text:span text:style-name="T2">任兩個節點之間都找得到路徑可以互達，不能有孤立點。</text:span></text:p>
          </table:table-cell>
        </table:table-row>
      </table:table>
      <text:p text:style-name="P6"/>
      <text:h text:style-name="P10" text:outline-level="2">1-2 MST 的定義</text:h>
      <text:p text:style-name="P6"/>
      <text:p text:style-name="P14">想像你要在 4 個城市之間鋪設電纜，每兩個城市之間都可以連線，但每條線有建設費用。你想「<text:span text:style-name="T3">用最低費用</text:span>，<text:span text:style-name="T4">讓每個城市都連通</text:span>」── 這就是 MST 要解決的問題！</text:p>
      <text:p text:style-name="P6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15">MST（最小生成樹）= 生成樹（Spanning Tree）+ <text:span text:style-name="T5">總權重最小（Minimum）</text:span></text:p>
            <text:p text:style-name="P16">（台灣教材兩種譯名並用：「最小生成樹」與「最小擴張樹」，公職考試兩者皆可，本筆記統一使用最小擴張樹）</text:p>
          </table:table-cell>
        </table:table-row>
      </table:table>
      <text:p text:style-name="P6"/>
      <text:p text:style-name="P17">條件 1：<text:span text:style-name="T6">覆蓋所有節點（Spanning）</text:span></text:p>
      <text:p text:style-name="P18"><text:span text:style-name="T7">每個城市都必須被電纜接到</text:span>，不能有孤立的城市存在。</text:p>
      <table:table table:name="表格5" table:style-name="表格5">
        <table:table-column table:style-name="表格5.A"/>
        <table:table-column table:style-name="表格5.B"/>
        <table:table-row table:style-name="表格5.1">
          <table:table-cell table:style-name="表格5.A1" office:value-type="string">
            <text:p text:style-name="P19">❌ 不是生成樹</text:p>
            <text:p text:style-name="P20">A──B</text:p>
            <text:p text:style-name="P21"><text:s text:c="4"/>C──D</text:p>
            <text:p text:style-name="P22">A、B 一組，C、D 另一組，無法互通。</text:p>
          </table:table-cell>
          <table:table-cell table:style-name="表格5.B1" office:value-type="string">
            <text:p text:style-name="P23">✅ 覆蓋所有節點</text:p>
            <text:p text:style-name="P20">A──B</text:p>
            <text:p text:style-name="P20">|</text:p>
            <text:p text:style-name="P21">C──D</text:p>
            <text:p text:style-name="P24">A、B、C、D 全部被電纜接到。</text:p>
          </table:table-cell>
        </table:table-row>
      </table:table>
      <text:p text:style-name="P6"/>
      <text:p text:style-name="P17">條件 2：<text:span text:style-name="T6">不能有迴路（Cycle）</text:span></text:p>
      <text:p text:style-name="P18">電纜不能繞成圈。<text:span text:style-name="T8">只要有迴路，就代表有一條邊是多餘的</text:span>、可以省去的。</text:p>
      <table:table table:name="表格6" table:style-name="表格6">
        <table:table-column table:style-name="表格6.A"/>
        <table:table-column table:style-name="表格6.B"/>
        <table:table-row table:style-name="表格6.1">
          <table:table-cell table:style-name="表格6.A1" office:value-type="string">
            <text:p text:style-name="P19">❌ 有迴路，不合法</text:p>
            <text:p text:style-name="P20">A──B</text:p>
            <text:p text:style-name="P20">| <text:s/>|</text:p>
            <text:p text:style-name="P21">D──C</text:p>
            <text:p text:style-name="P22">A→B→C→D→A 可以繞一圈，形成 Cycle。</text:p>
          </table:table-cell>
          <table:table-cell table:style-name="表格6.B1" office:value-type="string">
            <text:p text:style-name="P23">✅ 去掉一條，仍連通</text:p>
            <text:p text:style-name="P20">A──B</text:p>
            <text:p text:style-name="P20"><text:s text:c="3"/>|</text:p>
            <text:p text:style-name="P21">D──C</text:p>
            <text:p text:style-name="P24">移除最貴的邊，四個城市依然可以互達。</text:p>
          </table:table-cell>
        </table:table-row>
      </table:table>
      <text:p text:style-name="P6"/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25">為什麼有迴路的圖一定不能是生成樹（更不能是 MST）？</text:p>
            <text:p text:style-name="P26">根本原因：<text:span text:style-name="T9">生成樹的定義要求「無 Cycle」</text:span>。<text:span text:style-name="T10">有迴路的連通圖不是 Tree，所以直接不符合生成樹的定義</text:span>。</text:p>
            <text:p text:style-name="P8"/>
            <text:p text:style-name="P27">進一步說明（以 A─B─C─A 三角形為例）：</text:p>
            <text:p text:style-name="P27">• 去掉其中任何一條邊，三個城市仍然透過另外兩條邊互通</text:p>
            <text:p text:style-name="P28">• 刪掉最貴那條邊後，費用更低且連通性不變</text:p>
            <text:p text:style-name="P28"><text:soft-page-break/>• 所以<text:span text:style-name="T11">有 Cycle 的圖裡，至少有一條邊是「可以刪掉且不影響連通」的多餘邊</text:span></text:p>
            <text:p text:style-name="P8"/>
            <text:p text:style-name="P29">➡ 有迴路 = 不是生成樹 = 一定不是 MST</text:p>
            <text:p text:style-name="P16">（不是因為「費用一定更高」，而是因為根本不符合 Tree 的定義）</text:p>
          </table:table-cell>
        </table:table-row>
      </table:table>
      <text:p text:style-name="P6"/>
      <text:p text:style-name="P17">由以上兩個條件推出的重要結論：<text:span text:style-name="T5">邊數一定是 V−1</text:span></text:p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18">「V−1 條邊」不是第三個獨立條件，而是由「覆蓋所有節點 + 無 Cycle」自然推導出來的結果。</text:p>
            <text:p text:style-name="P30">對 V 個節點而言：</text:p>
          </table:table-cell>
        </table:table-row>
      </table:table>
      <text:p text:style-name="P6"/>
      <table:table table:name="表格9" table:style-name="表格9">
        <table:table-column table:style-name="表格9.A"/>
        <table:table-column table:style-name="表格9.B"/>
        <table:table-row table:style-name="表格9.1">
          <table:table-cell table:style-name="表格9.A1" office:value-type="string">
            <text:p text:style-name="P19">邊數 &lt; V−1 <text:s/>→ <text:s/>一定不連通</text:p>
            <text:p text:style-name="P31">例：4 個城市，只有 2 條邊：</text:p>
            <text:p text:style-name="P21">A──B <text:s text:c="4"/>C──D</text:p>
            <text:p text:style-name="P32">A、B 是一組，C、D 是另一組，永遠無法互達。</text:p>
          </table:table-cell>
          <table:table-cell table:style-name="表格9.A1" office:value-type="string">
            <text:p text:style-name="P19">邊數 &gt; V−1 <text:s/>→ <text:s/>一定有 Cycle</text:p>
            <text:p text:style-name="P31">例：4 個城市，有 4 條邊：</text:p>
            <text:p text:style-name="P21">A──B <text:s/>| <text:s/>| <text:s/>D──C</text:p>
            <text:p text:style-name="P32">A→B→C→D→A 形成迴路，必定有多餘的邊。</text:p>
          </table:table-cell>
        </table:table-row>
      </table:table>
      <text:p text:style-name="P6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33">✅ 重要定理：</text:p>
            <text:p text:style-name="P34">「連通 + 無 Cycle」 <text:s/>⟺ <text:s/>「恰好 V−1 條邊」</text:p>
            <text:p text:style-name="P35">例：4 個節點，MST 必有 4−1 = 3 條邊。</text:p>
          </table:table-cell>
        </table:table-row>
      </table:table>
      <text:p text:style-name="P6"/>
      <text:p text:style-name="P17">條件 3：<text:span text:style-name="T6">在所有生成樹中，選總權重最小的那棵（Minimum）</text:span></text:p>
      <text:p text:style-name="P18"><text:span text:style-name="T12">滿足條件 1 和條件 2 的生成樹可能有很多棵</text:span>，MST 要從中<text:span text:style-name="T7">選出總費用最低的那一棵</text:span>。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36">舉例：4 個城市，邊的費用如下</text:p>
            <text:p text:style-name="P37">AB = 1，BD = 2，CD = 3，AC = 4</text:p>
            <text:p text:style-name="P38">方案 A：AB + BD + CD = 1 + 2 + 3 = 6 <text:s/>✅ 費用最低，這就是 MST</text:p>
            <text:p text:style-name="P39">方案 B：AB + BD + AC = 1 + 2 + 4 = 7 <text:s/>❌ 雖然合法，但費用較高</text:p>
          </table:table-cell>
        </table:table-row>
      </table:table>
      <text:p text:style-name="P6"/>
      <text:p text:style-name="P17">一句話記憶 &amp; 邏輯順序總結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40"><text:span text:style-name="T13">MST</text:span> = <text:span text:style-name="T14">覆蓋所有節點</text:span> <text:s/>+ <text:s/><text:span text:style-name="T15">沒有 Cycle</text:span> <text:s/>+ <text:s/><text:span text:style-name="T5">總權重最小</text:span></text:p>
            <text:p text:style-name="P41">且一定具有：<text:span text:style-name="T3">邊數 E = V − 1</text:span>（推論結果，非獨立條件）</text:p>
          </table:table-cell>
        </table:table-row>
      </table:table>
      <text:p text:style-name="P6"/>
      <text:p text:style-name="P42">正確的思考順序：</text:p>
      <text:p text:style-name="P43">① <text:span text:style-name="T12">覆蓋所有節點</text:span>（每個城市都要接到）</text:p>
      <text:p text:style-name="P16">↓</text:p>
      <text:p text:style-name="P43">② <text:span text:style-name="T16">不能有 Cycle</text:span>（有環就有多餘的邊，去掉更省）</text:p>
      <text:p text:style-name="P16">↓</text:p>
      <text:p text:style-name="P43">③ 因此<text:span text:style-name="T3">邊數一定是 V−1</text:span>（自然推導）</text:p>
      <text:p text:style-name="P16">↓</text:p>
      <text:p text:style-name="P43">④ 在所有符合以上條件的生成樹中，挑<text:span text:style-name="T17">總權重最小者</text:span></text:p>
      <text:p text:style-name="P16">↓</text:p>
      <text:p text:style-name="P44">✅ 就是 MST</text:p>
      <text:p text:style-name="P6"/>
      <text:h text:style-name="P10" text:outline-level="2">1-3 圖解：原始圖 vs MST</text:h>
      <text:p text:style-name="P6"/>
      <table:table table:name="表格13" table:style-name="表格13">
        <table:table-column table:style-name="表格13.A"/>
        <text:soft-page-break/>
        <table:table-row table:style-name="表格13.1">
          <table:table-cell table:style-name="表格13.A1" office:value-type="string">
            <text:p text:style-name="P45">原始圖（所有邊）： <text:s text:c="18"/>MST（花最少錢連通所有城市）：</text:p>
            <text:p text:style-name="P46"><text:s text:c="9"/>A <text:s text:c="31"/>A</text:p>
            <text:p text:style-name="P46"><text:s text:c="8"/>/ \ <text:s text:c="29"/>/</text:p>
            <text:p text:style-name="P46"><text:s text:c="7"/>1 <text:s text:c="2"/>4 <text:s text:c="4"/>← 4條邊 <text:s text:c="14"/>1 <text:s text:c="5"/>← 只選3條最便宜的邊</text:p>
            <text:p text:style-name="P46"><text:s text:c="6"/>/ <text:s text:c="4"/>\ <text:s text:c="25"/>/</text:p>
            <text:p text:style-name="P46"><text:s text:c="5"/>B --2-- C <text:s text:c="23"/>B --2-- C</text:p>
            <text:p text:style-name="P46"><text:s text:c="6"/>\ <text:s text:c="4"/>/ <text:s text:c="33"/>\</text:p>
            <text:p text:style-name="P46"><text:s text:c="7"/>5 <text:s text:c="2"/>3 <text:s text:c="35"/>3</text:p>
            <text:p text:style-name="P47"><text:span text:style-name="T18"><text:s text:c="8"/>\ / <text:s text:c="37"/>\</text:span></text:p>
            <text:p text:style-name="P48"><text:s text:c="9"/>D <text:s text:c="39"/>D</text:p>
            <text:p text:style-name="P45">邊清單：AB=1, AC=4, BC=2, BD=5, CD=3 <text:s text:c="2"/>✅ MST 邊：AB=1, BC=2, CD=3</text:p>
            <text:p text:style-name="P49">總費用 = 1+2+3 = 6（最省！）</text:p>
            <text:p text:style-name="P50">❌ 不選 AC=4：若選了，A─B─C─A 形成迴路，而且費用還比較貴</text:p>
            <text:p text:style-name="P50">❌ 不選 BD=5：若選了，B─C─D─B 形成迴路，同樣多此一舉</text:p>
            <text:p text:style-name="P51">✅ 驗證：4個節點 → V-1 = 3 條邊 <text:s/>✅ <text:s/>無迴路 <text:s/>✅ <text:s text:c="2"/>覆蓋 A,B,C,D <text:s/>✅</text:p>
          </table:table-cell>
        </table:table-row>
      </table:table>
      <text:p text:style-name="P6"/>
      <text:h text:style-name="P10" text:outline-level="2">1-4 為什麼連通圖才有 MST？</text:h>
      <text:p text:style-name="P6"/>
      <text:p text:style-name="P14">假設圖有兩個完全分開的部分（A-B 和 C-D，中間沒有任何邊相連），那麼 A 永遠無法到達 C，也就不可能用任何方式把它們都連起來，MST 就不存在了。這時候只能各自做「最小擴張森林（Minimum Spanning Forest）」。</text:p>
      <text:p text:style-name="P6"/>
      <text:p text:style-name="Standard"/>
      <text:h text:style-name="P9" text:outline-level="1">二、三種 MST 演算法快速比較</text:h>
      <text:p text:style-name="P6"/>
      <text:p text:style-name="P14">求 MST 有三種主流演算法，它們的「切入點」不同：<text:span text:style-name="T19">Prim 從點出發</text:span>、<text:span text:style-name="T20">Kruskal 從邊出發</text:span>、<text:span text:style-name="T21">Sollin 全體同時出發</text:span>。</text:p>
      <text:p text:style-name="P6"/>
      <table:table table:name="表格14" table:style-name="表格14">
        <table:table-column table:style-name="表格14.A" table:number-columns-repeated="5"/>
        <table:table-row table:style-name="表格14.1">
          <table:table-cell table:style-name="表格14.A1" office:value-type="string">
            <text:p text:style-name="P52">比較項目</text:p>
          </table:table-cell>
          <table:table-cell table:style-name="表格14.A1" office:value-type="string">
            <text:p text:style-name="P52">Prim</text:p>
          </table:table-cell>
          <table:table-cell table:style-name="表格14.A1" office:value-type="string">
            <text:p text:style-name="P52">Kruskal</text:p>
          </table:table-cell>
          <table:table-cell table:style-name="表格14.A1" office:value-type="string">
            <text:p text:style-name="P52">Sollin（Borůvka）</text:p>
          </table:table-cell>
          <table:table-cell table:style-name="表格14.A1" office:value-type="string">
            <text:p text:style-name="P52">MST 共同特性</text:p>
          </table:table-cell>
        </table:table-row>
        <table:table-row table:style-name="表格14.1">
          <table:table-cell table:style-name="表格14.A2" office:value-type="string">
            <text:p text:style-name="P53">出發點</text:p>
          </table:table-cell>
          <table:table-cell table:style-name="表格14.A2" office:value-type="string">
            <text:p text:style-name="P54">從「一個節點」開始往外長</text:p>
          </table:table-cell>
          <table:table-cell table:style-name="表格14.A2" office:value-type="string">
            <text:p text:style-name="P55">從「最小邊」開始一條條挑</text:p>
          </table:table-cell>
          <table:table-cell table:style-name="表格14.A2" office:value-type="string">
            <text:p text:style-name="P56">從「所有節點」同時出發</text:p>
          </table:table-cell>
          <table:table-cell table:style-name="表格14.A2" office:value-type="string">
            <text:p text:style-name="P53">V-1 條邊，無 Cycle</text:p>
          </table:table-cell>
        </table:table-row>
        <table:table-row table:style-name="表格14.1">
          <table:table-cell table:style-name="表格14.A3" office:value-type="string">
            <text:p text:style-name="P53">核心工具</text:p>
          </table:table-cell>
          <table:table-cell table:style-name="表格14.A3" office:value-type="string">
            <text:p text:style-name="P53">Min-Heap 或矩陣</text:p>
          </table:table-cell>
          <table:table-cell table:style-name="表格14.A3" office:value-type="string">
            <text:p text:style-name="P53">Union-Find（並查集）</text:p>
          </table:table-cell>
          <table:table-cell table:style-name="表格14.A3" office:value-type="string">
            <text:p text:style-name="P53">Component 清單</text:p>
          </table:table-cell>
          <table:table-cell table:style-name="表格14.A3" office:value-type="string">
            <text:p text:style-name="P53">連通圖才存在</text:p>
          </table:table-cell>
        </table:table-row>
        <table:table-row table:style-name="表格14.1">
          <table:table-cell table:style-name="表格14.A2" office:value-type="string">
            <text:p text:style-name="P57">時間複雜度</text:p>
          </table:table-cell>
          <table:table-cell table:style-name="表格14.A2" office:value-type="string">
            <text:p text:style-name="P57">O(V²) 或 O(E log V)</text:p>
          </table:table-cell>
          <table:table-cell table:style-name="表格14.A2" office:value-type="string">
            <text:p text:style-name="P57">O(E log E)</text:p>
          </table:table-cell>
          <table:table-cell table:style-name="表格14.A2" office:value-type="string">
            <text:p text:style-name="P57">O(E log V)</text:p>
          </table:table-cell>
          <table:table-cell table:style-name="表格14.A2" office:value-type="string">
            <text:p text:style-name="P53">—</text:p>
          </table:table-cell>
        </table:table-row>
        <table:table-row table:style-name="表格14.1">
          <table:table-cell table:style-name="表格14.A3" office:value-type="string">
            <text:p text:style-name="P58">最適圖型</text:p>
          </table:table-cell>
          <table:table-cell table:style-name="表格14.A3" office:value-type="string">
            <text:p text:style-name="P58">稠密圖（邊很多）</text:p>
          </table:table-cell>
          <table:table-cell table:style-name="表格14.A3" office:value-type="string">
            <text:p text:style-name="P58">稀疏圖（邊很少）</text:p>
          </table:table-cell>
          <table:table-cell table:style-name="表格14.A3" office:value-type="string">
            <text:p text:style-name="P58">平行/分散式計算</text:p>
          </table:table-cell>
          <table:table-cell table:style-name="表格14.A3" office:value-type="string">
            <text:p text:style-name="P53">—</text:p>
          </table:table-cell>
        </table:table-row>
        <table:table-row table:style-name="表格14.1">
          <table:table-cell table:style-name="表格14.A2" office:value-type="string">
            <text:p text:style-name="P53">防止 Cycle 方式</text:p>
          </table:table-cell>
          <table:table-cell table:style-name="表格14.A2" office:value-type="string">
            <text:p text:style-name="P53">樹內→樹外規則，天然防止</text:p>
          </table:table-cell>
          <table:table-cell table:style-name="表格14.A2" office:value-type="string">
            <text:p text:style-name="P53">Union-Find 判斷</text:p>
          </table:table-cell>
          <table:table-cell table:style-name="表格14.A2" office:value-type="string">
            <text:p text:style-name="P53">Component 合併後自動排除</text:p>
          </table:table-cell>
          <table:table-cell table:style-name="表格14.A2" office:value-type="string">
            <text:p text:style-name="P53">—</text:p>
          </table:table-cell>
        </table:table-row>
      </table:table>
      <text:p text:style-name="P6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59">🧠 一句話記憶口訣：</text:p>
            <text:p text:style-name="P60">Prim 從「點」長出來 <text:s text:c="2"/>Kruskal 從「邊」挑起來 <text:s text:c="2"/>Sollin 大家同時搶</text:p>
            <text:p text:style-name="P61"><text:span text:style-name="T22">圖很密（邊多）→ Prim</text:span> <text:s/>│ <text:s/><text:span text:style-name="T22">圖很稀（邊少）→ Kruskal </text:span><text:s/>│ <text:s/>要<text:span text:style-name="T22">平行化 → Sollin</text:span></text:p>
          </table:table-cell>
        </table:table-row>
      </table:table>
      <text:p text:style-name="P6"/>
      <text:h text:style-name="P10" text:outline-level="2">2-1 什麼是稠密圖？什麼是稀疏圖？</text:h>
      <text:p text:style-name="P6"/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62">稠密圖（Dense Graph）： <text:s text:c="13"/>稀疏圖（Sparse Graph）：</text:p>
            <text:p text:style-name="P62">邊數 E 接近最大值 V(V-1)/2 <text:s text:c="10"/>邊數 E 遠小於 V(V-1)/2</text:p>
            <text:p text:style-name="P62">例：5個城市，幾乎每兩個都有路 <text:s text:c="7"/>例：100個城市，只有 110 條路</text:p>
            <text:p text:style-name="P62"><text:s text:c="2"/>A─B─C─D─E <text:s text:c="26"/>A <text:s text:c="9"/>B</text:p>
            <text:p text:style-name="P62"><text:s text:c="2"/>│╲│╱│╲│╱│ <text:s text:c="25"/>│ <text:s text:c="9"/>│</text:p>
            <text:p text:style-name="P62"><text:s text:c="2"/>└─┼─┼─┼─┘ <text:s text:c="2"/>邊非常多 <text:s text:c="13"/>C──D <text:s text:c="7"/>E</text:p>
            <text:p text:style-name="P62">100個節點最多 100×99/2 = 4950 條邊 <text:s text:c="2"/>100個節點可能只有 110 條邊</text:p>
            <text:p text:style-name="P62">→ 適合 Prim（不用排序） <text:s text:c="14"/>→ 適合 Kruskal（排序便宜）</text:p>
          </table:table-cell>
        </table:table-row>
      </table:table>
      <text:p text:style-name="P6"/>
      <text:p text:style-name="Standard"/>
      <text:h text:style-name="P9" text:outline-level="1">三、Prim 演算法 ── 從節點出發，像樹一樣往外長</text:h>
      <text:p text:style-name="P6"/>
      <text:h text:style-name="P10" text:outline-level="2">3-1 核心概念（超新手版解釋）</text:h>
      <text:p text:style-name="P6"/>
      <text:p text:style-name="P14">把 Prim 想像成「蓋電纜網路」的工程：<text:span text:style-name="T23">先把一個城市接上電纜</text:span>（<text:span text:style-name="T24">T = 已連通的城市集合</text:span>），然後<text:span text:style-name="T25">每次往外找</text:span><text:span text:style-name="T26">「接一個新城市費用最低的電纜」</text:span>，一步步延伸，直到所有城市都有電纜為止。</text:p>
      <text:p text:style-name="P6"/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11">Prim 執行步驟（只有4步！）：</text:p>
            <text:p text:style-name="P8">① <text:span text:style-name="T23">從任意一個節點出發</text:span>，<text:span text:style-name="T24">加入「已選集合 T</text:span>」。</text:p>
            <text:p text:style-name="P8">② <text:span text:style-name="T27">列出所有「T 內 → T 外」的邊</text:span>，這些叫<text:span text:style-name="T28">「候選邊」</text:span>。</text:p>
            <text:p text:style-name="P8">③ <text:span text:style-name="T29">從候選邊中挑出權重最小者</text:span>，<text:span text:style-name="T23">加入 MST</text:span>，並<text:span text:style-name="T24">把新節點加入 T</text:span>。</text:p>
            <text:p text:style-name="P8">④ 重複步驟②③，<text:span text:style-name="T28">直到 T 包含全部 V 個節點</text:span>（選了 <text:span text:style-name="T30">V-1 條邊</text:span>）。</text:p>
            <text:p text:style-name="P63">關鍵：候選邊的規則<text:span text:style-name="T31">「一端在 T 內、另一端在 T 外」天然保證不成環！</text:span></text:p>
          </table:table-cell>
        </table:table-row>
      </table:table>
      <text:p text:style-name="P6"/>
      <text:h text:style-name="P10" text:outline-level="2">3-2 完整圖解範例（4個節點 A, B, C, D）</text:h>
      <text:p text:style-name="P6"/>
      <text:p text:style-name="P14">範例圖：AB=1, AC=4, BC=2, BD=5, CD=3</text:p>
      <text:p text:style-name="P14"><draw:frame draw:style-name="fr1" draw:name="影像1" text:anchor-type="char" svg:x="4.872cm" svg:y="0.042cm" svg:width="5.943cm" svg:height="5.445cm" draw:z-index="0"><draw:image xlink:href="Pictures/1000000100000224000001F643D3A16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64">Step 1：從 A 開始，T = {A}</text:p>
            <text:p text:style-name="P65">T（已連通集合）= {A}</text:p>
            <text:p text:style-name="P65">候選邊（A 往外連的邊）：</text:p>
            <text:p text:style-name="P66"><text:s text:c="2"/>A─B = 1 <text:s text:c="2"/>← 最小！選它！</text:p>
            <text:p text:style-name="P67"><text:s text:c="2"/>A─C = 4</text:p>
            <text:p text:style-name="P65">動作：加入邊 A─B=1，節點 B 加入 T</text:p>
            <text:p text:style-name="P68">目前 MST： <text:s/>A │ 1 │ B</text:p>
          </table:table-cell>
        </table:table-row>
      </table:table>
      <text:p text:style-name="P6"/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64">Step 2：T = {A, B}，繼續往外長</text:p>
            <text:p text:style-name="P65">T（已連通集合）= {A, B}</text:p>
            <text:p text:style-name="P65">候選邊（T 往外連的邊）：</text:p>
            <text:p text:style-name="P69"><text:s text:c="2"/>A─C = 4 <text:s/>（A在T，C在T外）</text:p>
            <text:p text:style-name="P66"><text:s text:c="2"/>B─C = 2 <text:s/>（B在T，C在T外）← 最小！</text:p>
            <text:p text:style-name="P69"><text:s text:c="2"/>B─D = 5 <text:s/>（B在T，D在T外）</text:p>
            <text:p text:style-name="P70"><text:s text:c="2"/>❌ A─B 兩端都在 T，不是候選邊</text:p>
            <text:p text:style-name="P65">動作：加入邊 B─C=2，節點 C 加入 T</text:p>
            <text:p text:style-name="P68">目前 MST： <text:s/>A │ 1 │ B ──2── C</text:p>
          </table:table-cell>
        </table:table-row>
      </table:table>
      <text:p text:style-name="P6"/>
      <table:table table:name="表格21" table:style-name="表格21">
        <table:table-column table:style-name="表格21.A"/>
        <text:soft-page-break/>
        <table:table-row table:style-name="表格21.1">
          <table:table-cell table:style-name="表格21.A1" office:value-type="string">
            <text:p text:style-name="P64">Step 3：T = {A, B, C}，繼續往外長</text:p>
            <text:p text:style-name="P65">T（已連通集合）= {A, B, C}</text:p>
            <text:p text:style-name="P65">候選邊（T 往外連的邊）：</text:p>
            <text:p text:style-name="P71"><text:s text:c="2"/>A─C = 4 <text:s/>兩端都在T！不是候選邊</text:p>
            <text:p text:style-name="P47"><text:span text:style-name="T32"><text:s text:c="2"/>B─C = 2 <text:s/>兩端都在T！不是候選邊</text:span></text:p>
            <text:p text:style-name="P69"><text:s text:c="2"/>B─D = 5 <text:s/>（B在T，D在T外）</text:p>
            <text:p text:style-name="P72"><text:s text:c="2"/>C─D = 3 <text:s/>（C在T，D在T外）← 最小！</text:p>
            <text:p text:style-name="P65">動作：加入邊 C─D=3，節點 D 加入 T</text:p>
            <text:p text:style-name="P68">目前 MST： <text:s/>A │ 1 │ B ──2── C │ 3 │ D</text:p>
          </table:table-cell>
        </table:table-row>
      </table:table>
      <text:p text:style-name="P6"/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73">✅ 完成！T = {A, B, C, D}，所有節點已連通</text:p>
            <text:p text:style-name="P74">MST 邊集合：A─B=1, B─C=2, C─D=3</text:p>
            <text:p text:style-name="P75">總權重：1 + 2 + 3 = 6</text:p>
            <text:p text:style-name="P76">邊數驗證：V-1 = 4-1 = 3 條 <text:s/>✅</text:p>
          </table:table-cell>
        </table:table-row>
      </table:table>
      <text:p text:style-name="P6"/>
      <text:h text:style-name="P10" text:outline-level="2">3-3 為什麼 Prim 天然不產生 Cycle？</text:h>
      <text:p text:style-name="P6"/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64">【規則】：候選邊必須「一端在T、一端不在T」</text:p>
            <text:p text:style-name="P77">T = {A, B, C}：</text:p>
            <text:p text:style-name="P46">✅ 合法候選邊： <text:s text:c="13"/>❌ 自動排除（兩端都在T）：</text:p>
            <text:p text:style-name="P46"><text:s text:c="2"/>C → D <text:s/>一端在T外，OK <text:s text:c="7"/>A ─ B <text:s/>兩端都在T，若加 → 成環！</text:p>
            <text:p text:style-name="P49"><text:s text:c="2"/>B → D <text:s/>一端在T外，OK <text:s text:c="7"/>B ─ C <text:s/>兩端都在T，若加 → 成環！</text:p>
            <text:p text:style-name="P78">結論：Prim 靠「T內→T外」規則，完全不需要 Union-Find，也不用額外檢查環，天然保證 MST 合法！</text:p>
          </table:table-cell>
        </table:table-row>
      </table:table>
      <text:p text:style-name="P6"/>
      <text:h text:style-name="P10" text:outline-level="2">3-4 Prim 程式實作（Python）</text:h>
      <text:p text:style-name="P6"/>
      <text:p text:style-name="P14">以下是 Prim 演算法的 Python 實作，使用 Min-Heap（最小堆積）讓效率更好：</text:p>
      <text:p text:style-name="P6"/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79">import heapq <text:s text:c="3"/># Python 內建的最小堆積（Min-Heap）模組</text:p>
            <text:p text:style-name="P80"/>
            <text:p text:style-name="P79">def prim(graph, start=0):</text:p>
            <text:p text:style-name="P79"><text:s text:c="4"/>"""</text:p>
            <text:p text:style-name="P79"><text:s text:c="4"/>graph：鄰接表。graph[u] = [(邊的權重, 對方節點), ...]</text:p>
            <text:p text:style-name="P79"><text:s text:c="4"/>start：從哪個節點開始（預設節點 0）</text:p>
            <text:p text:style-name="P79"><text:s text:c="4"/>回傳：MST 邊清單 [(權重, 起點, 終點), ...] 和總權重</text:p>
            <text:p text:style-name="P79"><text:s text:c="4"/>"""</text:p>
            <text:p text:style-name="P79"><text:s text:c="4"/>n = len(graph) <text:s text:c="5"/># 節點數量</text:p>
            <text:p text:style-name="P79"><text:s text:c="4"/>in_tree = set() <text:s text:c="4"/># 記錄哪些節點已進入 T（已連通集合）</text:p>
            <text:p text:style-name="P79"><text:s text:c="4"/>mst_edges = [] <text:s text:c="5"/># 記錄 MST 選了哪些邊</text:p>
            <text:p text:style-name="P79"><text:s text:c="4"/>total = 0 <text:s text:c="10"/># MST 總權重</text:p>
            <text:p text:style-name="P79"><text:s text:c="4"/># Min-Heap 格式：（權重, 目標節點, 來自節點）</text:p>
            <text:p text:style-name="P79"><text:s text:c="4"/>heap = [(0, start, -1)] <text:s text:c="2"/># 起點虛擬邊（權重0，無來源）</text:p>
            <text:p text:style-name="P79"><text:s text:c="4"/>while heap and len(in_tree) &lt; n:</text:p>
            <text:p text:style-name="P79"><text:s text:c="8"/>w, u, prev = heapq.heappop(heap) <text:s text:c="2"/># 取出最小權重邊</text:p>
            <text:p text:style-name="P79"><text:s text:c="8"/>if u in in_tree: <text:s text:c="4"/># 如果 u 已在 T 裡，跳過</text:p>
            <text:p text:style-name="P79"><text:s text:c="12"/>continue</text:p>
            <text:p text:style-name="P79"><text:s text:c="8"/>in_tree.add(u) <text:s text:c="6"/># 把 u 加入 T</text:p>
            <text:p text:style-name="P79"><text:s text:c="8"/>if prev != -1: <text:s text:c="6"/># 記錄真實邊（起點那條虛擬邊不算）</text:p>
            <text:p text:style-name="P79"><text:s text:c="12"/>mst_edges.append((w, prev, u))</text:p>
            <text:p text:style-name="P79"><text:s text:c="12"/>total += w</text:p>
            <text:p text:style-name="P79"><text:s text:c="8"/>for edge_w, v in graph[u]:</text:p>
            <text:p text:style-name="P79"><text:s text:c="12"/>if v not in in_tree:</text:p>
            <text:p text:style-name="P79"><text:soft-page-break/><text:s text:c="16"/>heapq.heappush(heap, (edge_w, v, u))</text:p>
            <text:p text:style-name="P79"><text:s text:c="4"/>return mst_edges, total</text:p>
            <text:p text:style-name="P80"/>
            <text:p text:style-name="P79"># ─── 範例測試：A=0, B=1, C=2, D=3 ─────────────────</text:p>
            <text:p text:style-name="P79"># 邊：AB=1, AC=4, BC=2, BD=5, CD=3</text:p>
            <text:p text:style-name="P80"><text:span text:style-name="T33">graph = {</text:span></text:p>
            <text:p text:style-name="P79"><text:s text:c="4"/>0: [(1,1),(4,2)], <text:s text:c="9"/># A：到B(距離1), 到C(距離4)</text:p>
            <text:p text:style-name="P79"><text:s text:c="4"/>1: [(1,0),(2,2),(5,3)], <text:s text:c="3"/># B：到A(1), 到C(2), 到D(5)</text:p>
            <text:p text:style-name="P79"><text:s text:c="4"/>2: [(4,0),(2,1),(3,3)], <text:s text:c="3"/># C：到A(4), 到B(2), 到D(3)</text:p>
            <text:p text:style-name="P79"><text:s text:c="4"/>3: [(5,1),(3,2)], <text:s text:c="9"/># D：到B(5), 到C(3)</text:p>
            <text:p text:style-name="P79">}</text:p>
            <text:p text:style-name="P79">edges, total = prim(graph, start=0)</text:p>
            <text:p text:style-name="P79">print('MST 邊：', edges) <text:s text:c="3"/># 輸出：[(1,0,1), (2,1,2), (3,2,3)]</text:p>
            <text:p text:style-name="P79">print('總權重：', total) <text:s text:c="3"/># 輸出：6</text:p>
          </table:table-cell>
        </table:table-row>
      </table:table>
      <text:p text:style-name="P6"/>
      <text:h text:style-name="P10" text:outline-level="2">3-5 Prim 時間複雜度</text:h>
      <text:p text:style-name="P6"/>
      <table:table table:name="表格25" table:style-name="表格25">
        <table:table-column table:style-name="表格25.A"/>
        <table:table-column table:style-name="表格25.B"/>
        <table:table-column table:style-name="表格25.C"/>
        <table:table-column table:style-name="表格25.D"/>
        <table:table-row table:style-name="表格25.1">
          <table:table-cell table:style-name="表格25.A1" office:value-type="string">
            <text:p text:style-name="P81">版本</text:p>
          </table:table-cell>
          <table:table-cell table:style-name="表格25.A1" office:value-type="string">
            <text:p text:style-name="P81">資料結構</text:p>
          </table:table-cell>
          <table:table-cell table:style-name="表格25.A1" office:value-type="string">
            <text:p text:style-name="P81">時間複雜度</text:p>
          </table:table-cell>
          <table:table-cell table:style-name="表格25.A1" office:value-type="string">
            <text:p text:style-name="P81">什麼時候用？</text:p>
          </table:table-cell>
        </table:table-row>
        <table:table-row table:style-name="表格25.1">
          <table:table-cell table:style-name="表格25.A2" office:value-type="string">
            <text:p text:style-name="P82">基本版</text:p>
          </table:table-cell>
          <table:table-cell table:style-name="表格25.A2" office:value-type="string">
            <text:p text:style-name="P82">鄰接矩陣</text:p>
          </table:table-cell>
          <table:table-cell table:style-name="表格25.A2" office:value-type="string">
            <text:p text:style-name="P82">O(V²)</text:p>
          </table:table-cell>
          <table:table-cell table:style-name="表格25.A2" office:value-type="string">
            <text:p text:style-name="P82">稠密圖（邊數接近 V²）時，這個反而最省</text:p>
          </table:table-cell>
        </table:table-row>
        <table:table-row table:style-name="表格25.1">
          <table:table-cell table:style-name="表格25.A3" office:value-type="string">
            <text:p text:style-name="P82">最佳化版</text:p>
          </table:table-cell>
          <table:table-cell table:style-name="表格25.A3" office:value-type="string">
            <text:p text:style-name="P82">Min-Heap（優先佇列）</text:p>
          </table:table-cell>
          <table:table-cell table:style-name="表格25.A3" office:value-type="string">
            <text:p text:style-name="P82">O(E log V)</text:p>
          </table:table-cell>
          <table:table-cell table:style-name="表格25.A3" office:value-type="string">
            <text:p text:style-name="P82">一般圖，E 不太大時使用</text:p>
          </table:table-cell>
        </table:table-row>
      </table:table>
      <text:p text:style-name="P6"/>
      <table:table table:name="新增表格62" table:style-name="新增表格62">
        <table:table-column table:style-name="新增表格62.A"/>
        <table:table-row table:style-name="新增表格62.1">
          <table:table-cell table:style-name="新增表格62.A1" office:value-type="string">
            <text:p text:style-name="P11">【版本一】鄰接矩陣版 → O(V²)</text:p>
            <text:p text:style-name="P11">【版本二】Min-Heap 版 → O(E log V)</text:p>
            <text:p text:style-name="P8">稠密圖（E ≈ V²）用版本一更省；稀疏圖用版本二更快。</text:p>
          </table:table-cell>
        </table:table-row>
      </table:table>
      <text:p text:style-name="P6"/>
      <table:table table:name="新增表格63" table:style-name="新增表格63">
        <table:table-column table:style-name="新增表格63.A"/>
        <table:table-row table:style-name="新增表格63.1">
          <table:table-cell table:style-name="新增表格63.A1" office:value-type="string">
            <text:p text:style-name="P7">版本一：鄰接矩陣版 → O(V²)</text:p>
            <text:p text:style-name="P8"/>
            <text:p text:style-name="P8">Prim 的外層迴圈跑 V 次（把 V 個節點一一加入集合 T）。</text:p>
            <text:p text:style-name="P8">每一次迭代做兩件事：</text:p>
            <text:p text:style-name="P8">① 從所有「T 外節點」找距離 T 最近的節點 → 掃描整行矩陣 O(V)</text:p>
            <text:p text:style-name="P8">② 把新節點加入 T，更新其他節點到 T 的最短距離 → 再掃一整行 O(V)</text:p>
            <text:p text:style-name="P8"/>
            <text:p text:style-name="P23">→ 外層 V 次 × 每次 O(V) = O(V × V) = O(V²)</text:p>
            <text:p text:style-name="P8"/>
            <text:p text:style-name="P25">為什麼每次掃描是 O(V)？</text:p>
            <text:p text:style-name="P8">鄰接矩陣是 V×V 的表格。要找「最近節點」或「更新距離」，</text:p>
            <text:p text:style-name="P8">都必須逐格讀整行，共 V 格 → 每次 O(V)。</text:p>
            <text:p text:style-name="P8"/>
            <text:p text:style-name="P25">什麼時候 O(V²) 反而比較好？</text:p>
            <text:p text:style-name="P8">稠密圖（E ≈ V²）時，O(E log V) ≈ O(V² log V)，</text:p>
            <text:p text:style-name="P63">比 O(V²) 還慢！→ 稠密圖請用矩陣版。</text:p>
          </table:table-cell>
        </table:table-row>
      </table:table>
      <text:p text:style-name="P6"/>
      <table:table table:name="新增表格64" table:style-name="新增表格64">
        <table:table-column table:style-name="新增表格64.A"/>
        <table:table-column table:style-name="新增表格64.B"/>
        <table:table-column table:style-name="新增表格64.C"/>
        <table:table-column table:style-name="新增表格64.D"/>
        <table:table-row table:style-name="新增表格64.1">
          <table:table-cell table:style-name="新增表格64.A1" office:value-type="string">
            <text:p text:style-name="P81">操作</text:p>
          </table:table-cell>
          <table:table-cell table:style-name="新增表格64.A1" office:value-type="string">
            <text:p text:style-name="P81">執行次數</text:p>
          </table:table-cell>
          <table:table-cell table:style-name="新增表格64.A1" office:value-type="string">
            <text:p text:style-name="P81">每次花費</text:p>
          </table:table-cell>
          <table:table-cell table:style-name="新增表格64.A1" office:value-type="string">
            <text:p text:style-name="P81">小計</text:p>
          </table:table-cell>
        </table:table-row>
        <table:table-row table:style-name="新增表格64.1">
          <table:table-cell table:style-name="新增表格64.A2" office:value-type="string">
            <text:p text:style-name="P8">找最小距離節點</text:p>
          </table:table-cell>
          <table:table-cell table:style-name="新增表格64.A2" office:value-type="string">
            <text:p text:style-name="P8">V 次（每個節點加入一次）</text:p>
          </table:table-cell>
          <table:table-cell table:style-name="新增表格64.A2" office:value-type="string">
            <text:p text:style-name="P8">O(V)（掃全部 T 外節點）</text:p>
          </table:table-cell>
          <table:table-cell table:style-name="新增表格64.A2" office:value-type="string">
            <text:p text:style-name="P8">V × V = O(V²)</text:p>
          </table:table-cell>
        </table:table-row>
        <table:table-row table:style-name="新增表格64.1">
          <table:table-cell table:style-name="新增表格64.A3" office:value-type="string">
            <text:p text:style-name="P8">更新鄰居距離</text:p>
          </table:table-cell>
          <table:table-cell table:style-name="新增表格64.A3" office:value-type="string">
            <text:p text:style-name="P8">V 次</text:p>
          </table:table-cell>
          <table:table-cell table:style-name="新增表格64.A3" office:value-type="string">
            <text:p text:style-name="P8">O(V)（掃整行矩<text:soft-page-break/>陣）</text:p>
          </table:table-cell>
          <table:table-cell table:style-name="新增表格64.A3" office:value-type="string">
            <text:p text:style-name="P8">V × V = O(V²)</text:p>
          </table:table-cell>
        </table:table-row>
        <table:table-row table:style-name="新增表格64.1">
          <table:table-cell table:style-name="新增表格64.A4" office:value-type="string">
            <text:p text:style-name="P33">總計</text:p>
          </table:table-cell>
          <table:table-cell table:style-name="新增表格64.A4" office:value-type="string">
            <text:p text:style-name="P33">—</text:p>
          </table:table-cell>
          <table:table-cell table:style-name="新增表格64.A4" office:value-type="string">
            <text:p text:style-name="P33">—</text:p>
          </table:table-cell>
          <table:table-cell table:style-name="新增表格64.A4" office:value-type="string">
            <text:p text:style-name="P33">O(V²)</text:p>
          </table:table-cell>
        </table:table-row>
      </table:table>
      <text:p text:style-name="P6"/>
      <table:table table:name="新增表格65" table:style-name="新增表格65">
        <table:table-column table:style-name="新增表格65.A"/>
        <table:table-row table:style-name="新增表格65.1">
          <table:table-cell table:style-name="新增表格65.A1" office:value-type="string">
            <text:p text:style-name="P7">版本二：Min-Heap（最小堆積）版 → O(E log V)</text:p>
            <text:p text:style-name="P8"/>
            <text:p text:style-name="P8">改用 Min-Heap 儲存候選邊，每次直接從堆頂取出最小邊，不需掃描全部。</text:p>
            <text:p text:style-name="P8"/>
            <text:p text:style-name="P36">【注意】這裡的程式碼是「Lazy Prim」實作：</text:p>
            <text:p text:style-name="P8">每當有新節點加入 T，就把它所有鄰邊都 push 進 Heap（不論對方是否已在 T 內）。</text:p>
            <text:p text:style-name="P8">因此同一個節點可能被多條邊重複放入 Heap，Heap 中最多累積 O(E) 個元素。</text:p>
            <text:p text:style-name="P8"/>
            <text:p text:style-name="P8">① Heap 總共插入 O(E) 次（每條邊最多 push 一次）</text:p>
            <text:p text:style-name="P8">② Heap 總共彈出 O(E) 次（含重複彈出後直接跳過的節點）</text:p>
            <text:p text:style-name="P8">③ 每次 push / pop：Heap 中最多 E 個元素，樹高 = log E ≤ 2 log V = O(log V)</text:p>
            <text:p text:style-name="P8"/>
            <text:p text:style-name="P23">→ O(E) 次操作 × 每次 O(log V) = O(E log V)</text:p>
            <text:p text:style-name="P8"/>
            <text:p text:style-name="P25">為什麼 Heap 的 push / pop 是 O(log E)？</text:p>
            <text:p text:style-name="P8">Min-Heap 是完全二元樹，樹高 = log（元素數）。</text:p>
            <text:p text:style-name="P8">Heap 裡最多有 O(E) 個元素，所以樹高 = log E = O(log V)。</text:p>
            <text:p text:style-name="P8">push 和 pop 各沿樹高走一趟 → 各花 O(log E) = O(log V)。</text:p>
          </table:table-cell>
        </table:table-row>
      </table:table>
      <text:p text:style-name="P6"/>
      <table:table table:name="新增表格66" table:style-name="新增表格66">
        <table:table-column table:style-name="新增表格66.A"/>
        <table:table-column table:style-name="新增表格66.B"/>
        <table:table-column table:style-name="新增表格66.C"/>
        <table:table-column table:style-name="新增表格66.D"/>
        <table:table-row table:style-name="新增表格66.1">
          <table:table-cell table:style-name="新增表格66.A1" office:value-type="string">
            <text:p text:style-name="P81">操作</text:p>
          </table:table-cell>
          <table:table-cell table:style-name="新增表格66.A1" office:value-type="string">
            <text:p text:style-name="P81">執行次數</text:p>
          </table:table-cell>
          <table:table-cell table:style-name="新增表格66.A1" office:value-type="string">
            <text:p text:style-name="P81">每次花費</text:p>
          </table:table-cell>
          <table:table-cell table:style-name="新增表格66.A1" office:value-type="string">
            <text:p text:style-name="P81">小計</text:p>
          </table:table-cell>
        </table:table-row>
        <table:table-row table:style-name="新增表格66.1">
          <table:table-cell table:style-name="新增表格66.A2" office:value-type="string">
            <text:p text:style-name="P8">push 入 Heap</text:p>
          </table:table-cell>
          <table:table-cell table:style-name="新增表格66.A2" office:value-type="string">
            <text:p text:style-name="P8">最多 E 次（每條邊）</text:p>
          </table:table-cell>
          <table:table-cell table:style-name="新增表格66.A2" office:value-type="string">
            <text:p text:style-name="P8">O(log E) = O(log V)</text:p>
          </table:table-cell>
          <table:table-cell table:style-name="新增表格66.A2" office:value-type="string">
            <text:p text:style-name="P8">O(E log V)</text:p>
          </table:table-cell>
        </table:table-row>
        <table:table-row table:style-name="新增表格66.1">
          <table:table-cell table:style-name="新增表格66.A3" office:value-type="string">
            <text:p text:style-name="P8">pop 出 Heap</text:p>
          </table:table-cell>
          <table:table-cell table:style-name="新增表格66.A3" office:value-type="string">
            <text:p text:style-name="P8">最多 E 次</text:p>
          </table:table-cell>
          <table:table-cell table:style-name="新增表格66.A3" office:value-type="string">
            <text:p text:style-name="P8">O(log E) = O(log V)</text:p>
          </table:table-cell>
          <table:table-cell table:style-name="新增表格66.A3" office:value-type="string">
            <text:p text:style-name="P8">O(E log V)</text:p>
          </table:table-cell>
        </table:table-row>
        <table:table-row table:style-name="新增表格66.1">
          <table:table-cell table:style-name="新增表格66.A2" office:value-type="string">
            <text:p text:style-name="P8">節點加入 T</text:p>
          </table:table-cell>
          <table:table-cell table:style-name="新增表格66.A2" office:value-type="string">
            <text:p text:style-name="P8">V 次</text:p>
          </table:table-cell>
          <table:table-cell table:style-name="新增表格66.A2" office:value-type="string">
            <text:p text:style-name="P8">O(1)</text:p>
          </table:table-cell>
          <table:table-cell table:style-name="新增表格66.A2" office:value-type="string">
            <text:p text:style-name="P8">O(V)</text:p>
          </table:table-cell>
        </table:table-row>
        <table:table-row table:style-name="新增表格66.1">
          <table:table-cell table:style-name="新增表格66.A5" office:value-type="string">
            <text:p text:style-name="P33">總計</text:p>
          </table:table-cell>
          <table:table-cell table:style-name="新增表格66.A5" office:value-type="string">
            <text:p text:style-name="P33">—</text:p>
          </table:table-cell>
          <table:table-cell table:style-name="新增表格66.A5" office:value-type="string">
            <text:p text:style-name="P33">—</text:p>
          </table:table-cell>
          <table:table-cell table:style-name="新增表格66.A5" office:value-type="string">
            <text:p text:style-name="P33">O(E log V)</text:p>
          </table:table-cell>
        </table:table-row>
      </table:table>
      <text:p text:style-name="P6"/>
      <table:table table:name="新增表格67" table:style-name="新增表格67">
        <table:table-column table:style-name="新增表格67.A"/>
        <table:table-row table:style-name="新增表格67.1">
          <table:table-cell table:style-name="新增表格67.A1" office:value-type="string">
            <text:p text:style-name="P33">✅ 兩個版本怎麼選？</text:p>
            <text:p text:style-name="P8">稠密圖（E ≈ V²）：O(V²) 矩陣版更省</text:p>
            <text:p text:style-name="P16">因為 O(E log V) ≈ O(V² log V) 反而更慢</text:p>
            <text:p text:style-name="P8">稀疏∼一般圖（E &lt;&lt; V²）：O(E log V) Heap 版更快</text:p>
            <text:p text:style-name="P63">判斷標準：E 接近 V² → 用矩陣；E 遠小於 V² → 用 Heap</text:p>
          </table:table-cell>
        </table:table-row>
      </table:table>
      <text:p text:style-name="P6"/>
      <text:p text:style-name="Standard"/>
      <text:h text:style-name="P9" text:outline-level="1">四、Kruskal 演算法 ── 從邊開始，最小邊優先</text:h>
      <text:p text:style-name="P6"/>
      <text:h text:style-name="P10" text:outline-level="2">4-1 核心概念（超新手版解釋）</text:h>
      <text:p text:style-name="P6"/>
      <text:p text:style-name="P14">把 Kruskal 想像成「買電纜」：先把所有可用的電纜按費用從低到高排好，然後從最便宜的開始買，買一條就把它連上。唯一的限制是：「這條電纜連上後不能造成迴路（因為迴路代表多花了不必要的錢）」。</text:p>
      <text:p text:style-name="P6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11">Kruskal 執行步驟（只有5步！）：</text:p>
            <text:p text:style-name="P8">① 列出圖中所有邊，按「權重由小到大」排序。</text:p>
            <text:p text:style-name="P8">② 準備 Union-Find（下面會詳細解釋），一開始每個節點自成一組。</text:p>
            <text:p text:style-name="P8">③ 從最小邊 (u, v) 開始處理：查問 Find(u) 和 Find(v)。</text:p>
            <text:p text:style-name="P8">④ 如果 Find(u) ≠ Find(v)（兩個節點不同組）→ 加入 MST，合併兩組。</text:p>
            <text:p text:style-name="P8">⑤ 如果 Find(u) = Find(v)（兩個節點同組）→ 加了會成環，跳過！</text:p>
            <text:p text:style-name="P8">不斷重複直到選出 V-1 條邊，MST 完成。</text:p>
          </table:table-cell>
        </table:table-row>
      </table:table>
      <text:p text:style-name="P6"/>
      <text:h text:style-name="P10" text:outline-level="2">4-2 Union-Find（並查集）詳細解說</text:h>
      <text:p text:style-name="P6"/>
      <text:p text:style-name="P14">Union-Find 是一種追蹤「哪些節點已經屬於同一個連通組」的工具。每個節點都有一個「代表人（root）」，同組的節點共用同一個代表人。</text:p>
      <text:p text:style-name="P6"/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83">【Find 操作】：找到某個節點的代表人</text:p>
            <text:p text:style-name="P83">初始狀態：每個節點自己代表自己</text:p>
            <text:p text:style-name="P83">節點： <text:s/>A <text:s text:c="3"/>B <text:s text:c="3"/>C <text:s text:c="3"/>D <text:s text:c="3"/>E</text:p>
            <text:p text:style-name="P83">代表： <text:s/>A <text:s text:c="3"/>B <text:s text:c="3"/>C <text:s text:c="3"/>D <text:s text:c="3"/>E <text:s text:c="2"/>（每人自己是代表）</text:p>
            <text:p text:style-name="P83">集合：{A} <text:s/>{B} <text:s/>{C} <text:s/>{D} <text:s/>{E}</text:p>
            <text:p text:style-name="P83">─────────────────────────────────────────────────────────</text:p>
            <text:p text:style-name="P83">【Union 操作】：合併兩個節點所在的組</text:p>
            <text:p text:style-name="P83">Union(A, B)：把 A 的組和 B 的組合併 → B 的代表改成 A</text:p>
            <text:p text:style-name="P83">節點： <text:s/>A <text:s text:c="3"/>B <text:s text:c="3"/>C <text:s text:c="3"/>D <text:s text:c="3"/>E</text:p>
            <text:p text:style-name="P83">代表： <text:s/>A <text:s text:c="3"/>A <text:s text:c="3"/>C <text:s text:c="3"/>D <text:s text:c="3"/>E <text:s text:c="2"/>← B 的代表變成 A</text:p>
            <text:p text:style-name="P83">集合：{A,B} <text:s/>{C} <text:s/>{D} <text:s/>{E}</text:p>
            <text:p text:style-name="P83">Union(C, D)：集合：{A,B} <text:s/>{C,D} <text:s/>{E}</text:p>
            <text:p text:style-name="P83">Union(B, C)：Find(B)=A，Find(C)=C，不同 → 合併</text:p>
            <text:p text:style-name="P83">集合：{A,B,C,D} <text:s/>{E}</text:p>
            <text:p text:style-name="P83">問：Union(A, D)？</text:p>
            <text:p text:style-name="P83">Find(A)=A，Find(D)=A → 相同！→ 跳過，加了會成環！</text:p>
            <text:p text:style-name="P83">─────────────────────────────────────────────────────────</text:p>
            <text:p text:style-name="P83">核心口訣：同集合 → 跳過（會成環） <text:s/>不同集合 → 合併（加入 MST）</text:p>
          </table:table-cell>
        </table:table-row>
      </table:table>
      <text:p text:style-name="P6"/>
      <text:h text:style-name="P10" text:outline-level="2">4-3 完整圖解範例（5個節點）</text:h>
      <text:p text:style-name="P6"/>
      <text:p text:style-name="P14">範例圖：AB=1, AC=4, BC=2, BD=5, CD=3, DE=6, CE=8</text:p>
      <text:p text:style-name="P6"/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83">原始圖： <text:s text:c="16"/>A</text:p>
            <text:p text:style-name="P83"><text:s text:c="16"/>/ \</text:p>
            <text:p text:style-name="P83"><text:s text:c="15"/>1 <text:s text:c="2"/>4</text:p>
            <text:p text:style-name="P83"><text:s text:c="14"/>/ <text:s text:c="4"/>\</text:p>
            <text:p text:style-name="P83"><text:s text:c="13"/>B --2-- C --8-- E</text:p>
            <text:p text:style-name="P84"><text:soft-page-break/><text:span text:style-name="T18"><text:s text:c="14"/>\ <text:s text:c="4"/>/</text:span></text:p>
            <text:p text:style-name="P83"><text:s text:c="15"/>5 <text:s text:c="2"/>3</text:p>
            <text:p text:style-name="P83"><text:s text:c="16"/>\ /</text:p>
            <text:p text:style-name="P83"><text:s text:c="17"/>D --6-- E</text:p>
            <text:p text:style-name="P84"/>
            <text:p text:style-name="P83">所有邊排序（由小到大）：AB=1, BC=2, CD=3, AC=4, BD=5, DE=6, CE=8</text:p>
          </table:table-cell>
        </table:table-row>
      </table:table>
      <text:p text:style-name="P6"/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85">Step 1：選最小邊 AB=1</text:p>
            <text:p text:style-name="P46">Find(A)=A <text:s text:c="3"/>Find(B)=B <text:s text:c="3"/>← 不同集合！可以加入</text:p>
            <text:p text:style-name="P46">Union(A, B) → 合併成 {A,B}</text:p>
            <text:p text:style-name="P46">集合狀態：{A,B} <text:s/>{C} <text:s/>{D} <text:s/>{E}</text:p>
            <text:p text:style-name="P46">已選邊：AB=1 <text:s/>（共 1 條）</text:p>
            <text:p text:style-name="P46">圖的連線狀態：A──1──B <text:s text:c="7"/>C <text:s text:c="10"/>D <text:s text:c="10"/>E</text:p>
          </table:table-cell>
        </table:table-row>
      </table:table>
      <text:p text:style-name="P6"/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85">Step 2：選次小邊 BC=2</text:p>
            <text:p text:style-name="P46">Find(B)=A <text:s text:c="3"/>Find(C)=C <text:s text:c="3"/>← 不同集合！可以加入</text:p>
            <text:p text:style-name="P46">Union(B, C) → 即 Union(A, C) → {A,B,C}</text:p>
            <text:p text:style-name="P46">集合狀態：{A,B,C} <text:s/>{D} <text:s/>{E}</text:p>
            <text:p text:style-name="P46">已選邊：AB=1, BC=2 <text:s/>（共 2 條）</text:p>
            <text:p text:style-name="P46">圖的連線狀態：A──1──B──2──C <text:s text:c="7"/>D <text:s text:c="10"/>E</text:p>
          </table:table-cell>
        </table:table-row>
      </table:table>
      <text:p text:style-name="P6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85">Step 3：選次小邊 CD=3</text:p>
            <text:p text:style-name="P46">Find(C)=A <text:s text:c="3"/>Find(D)=D <text:s text:c="3"/>← 不同集合！可以加入</text:p>
            <text:p text:style-name="P46">Union(C, D) → 即 Union(A, D) → {A,B,C,D}</text:p>
            <text:p text:style-name="P46">集合狀態：{A,B,C,D} <text:s/>{E}</text:p>
            <text:p text:style-name="P46">已選邊：AB=1, BC=2, CD=3 <text:s/>（共 3 條）</text:p>
            <text:p text:style-name="P46">圖的連線狀態：A──1──B──2──C──3──D <text:s text:c="7"/>E</text:p>
          </table:table-cell>
        </table:table-row>
      </table:table>
      <text:p text:style-name="P6"/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86">Step 4：看邊 AC=4 → ⛔ 跳過！</text:p>
            <text:p text:style-name="P46">Find(A)=A <text:s text:c="3"/>Find(C)=A <text:s text:c="3"/>← 相同集合！加了會成環</text:p>
            <text:p text:style-name="P46">若加入 A─C：</text:p>
            <text:p text:style-name="P46"><text:s text:c="2"/>A──1──B──2──C</text:p>
            <text:p text:style-name="P46"><text:s text:c="2"/>└──────────4──┘ <text:s text:c="2"/>← A─B─C─A 形成三角形迴路！</text:p>
            <text:p text:style-name="P46">⛔ 跳過 AC=4</text:p>
          </table:table-cell>
        </table:table-row>
      </table:table>
      <text:p text:style-name="P6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86">Step 5：看邊 BD=5 → ⛔ 跳過！</text:p>
            <text:p text:style-name="P46">Find(B)=A <text:s text:c="3"/>Find(D)=A <text:s text:c="3"/>← 相同集合！加了會成環</text:p>
            <text:p text:style-name="P46">若加入 B─D：B 和 D 已透過 B─C─D 相連，成環！</text:p>
            <text:p text:style-name="P46">⛔ 跳過 BD=5</text:p>
          </table:table-cell>
        </table:table-row>
      </table:table>
      <text:p text:style-name="P6"/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85">Step 6：選邊 DE=6 ← 最後一條！</text:p>
            <text:p text:style-name="P46">Find(D)=A <text:s text:c="3"/>Find(E)=E <text:s text:c="3"/>← 不同集合！可以加入</text:p>
            <text:p text:style-name="P46">Union(D, E) → {A,B,C,D,E} <text:s/>所有節點都在同一組了！</text:p>
            <text:p text:style-name="P46">集合狀態：{A,B,C,D,E}</text:p>
            <text:p text:style-name="P46">已選邊：AB=1, BC=2, CD=3, DE=6 <text:s/>（共 4 條 = V-1 ✅）</text:p>
            <text:p text:style-name="P46">圖的連線狀態：A──1──B──2──C──3──D──6──E</text:p>
            <text:p text:style-name="P46">✅ 所有節點已連通，MST 完成！</text:p>
          </table:table-cell>
        </table:table-row>
      </table:table>
      <text:p text:style-name="P6"/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73">✅ MST 完成</text:p>
            <text:p text:style-name="P74">MST 邊集合：AB=1, BC=2, CD=3, DE=6</text:p>
            <text:p text:style-name="P75">總權重：1 + 2 + 3 + 6 = 12</text:p>
            <text:p text:style-name="P76">邊數驗證：V-1 = 5-1 = 4 條 <text:s/>✅</text:p>
          </table:table-cell>
        </table:table-row>
      </table:table>
      <text:p text:style-name="P6"/>
      <text:h text:style-name="P87" text:outline-level="2"><text:soft-page-break/><text:span text:style-name="T34">4-4 Kruskal 程式實作（Python）</text:span></text:h>
      <text:p text:style-name="P6"/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79"># ─── Union-Find 資料結構 ───────────────────────────────</text:p>
            <text:p text:style-name="P79">class UnionFind:</text:p>
            <text:p text:style-name="P79"><text:s text:c="4"/>def __init__(self, n):</text:p>
            <text:p text:style-name="P79"><text:s text:c="8"/># parent[i] = i 的代表人；一開始每個人代表自己</text:p>
            <text:p text:style-name="P79"><text:s text:c="8"/>self.parent = list(range(n))</text:p>
            <text:p text:style-name="P79"><text:s text:c="8"/># rank 用來讓樹不要長太高（優化用）</text:p>
            <text:p text:style-name="P79"><text:s text:c="8"/>self.rank <text:s text:c="2"/>= [0] * n</text:p>
            <text:p text:style-name="P80"/>
            <text:p text:style-name="P79"><text:s text:c="4"/>def find(self, x):</text:p>
            <text:p text:style-name="P79"><text:s text:c="8"/># 找 x 的代表人，並「路徑壓縮」</text:p>
            <text:p text:style-name="P79"><text:s text:c="8"/>if self.parent[x] != x:</text:p>
            <text:p text:style-name="P79"><text:s text:c="12"/>self.parent[x] = self.find(self.parent[x])</text:p>
            <text:p text:style-name="P79"><text:s text:c="8"/>return self.parent[x]</text:p>
            <text:p text:style-name="P80"/>
            <text:p text:style-name="P79"><text:s text:c="4"/>def union(self, x, y):</text:p>
            <text:p text:style-name="P79"><text:s text:c="8"/>rx, ry = self.find(x), self.find(y)</text:p>
            <text:p text:style-name="P79"><text:s text:c="8"/>if rx == ry:</text:p>
            <text:p text:style-name="P79"><text:s text:c="12"/>return False <text:s text:c="2"/># ← 同集合，跳過！</text:p>
            <text:p text:style-name="P79"><text:s text:c="8"/>if self.rank[rx] &lt; self.rank[ry]:</text:p>
            <text:p text:style-name="P79"><text:s text:c="12"/>rx, ry = ry, rx</text:p>
            <text:p text:style-name="P79"><text:s text:c="8"/>self.parent[ry] = rx</text:p>
            <text:p text:style-name="P79"><text:s text:c="8"/>if self.rank[rx] == self.rank[ry]:</text:p>
            <text:p text:style-name="P79"><text:s text:c="12"/>self.rank[rx] += 1</text:p>
            <text:p text:style-name="P79"><text:s text:c="8"/>return True</text:p>
            <text:p text:style-name="P80"/>
            <text:p text:style-name="P79"># ─── Kruskal 主演算法 ──────────────────────────────────</text:p>
            <text:p text:style-name="P79">def kruskal(n, edges):</text:p>
            <text:p text:style-name="P79"><text:s text:c="4"/>edges.sort() <text:s text:c="8"/># Step 1：所有邊由小到大排序</text:p>
            <text:p text:style-name="P79"><text:s text:c="4"/>uf = UnionFind(n)</text:p>
            <text:p text:style-name="P79"><text:s text:c="4"/>mst = []</text:p>
            <text:p text:style-name="P79"><text:s text:c="4"/>total = 0</text:p>
            <text:p text:style-name="P79"><text:s text:c="4"/>for w, u, v in edges:</text:p>
            <text:p text:style-name="P79"><text:s text:c="8"/>if uf.union(u, v):</text:p>
            <text:p text:style-name="P79"><text:s text:c="12"/>mst.append((w, u, v))</text:p>
            <text:p text:style-name="P79"><text:s text:c="12"/>total += w</text:p>
            <text:p text:style-name="P79"><text:s text:c="8"/>if len(mst) == n - 1:</text:p>
            <text:p text:style-name="P79"><text:s text:c="12"/>break</text:p>
            <text:p text:style-name="P79"><text:s text:c="4"/>return mst, total</text:p>
            <text:p text:style-name="P80"/>
            <text:p text:style-name="P79"># ─── 測試 ─────────────────────────────────────────────</text:p>
            <text:p text:style-name="P79">n = 5</text:p>
            <text:p text:style-name="P79">edges = [(1,0,1),(2,1,2),(3,2,3),(4,0,2),(5,1,3),(6,3,4),(8,2,4)]</text:p>
            <text:p text:style-name="P79">mst, total = kruskal(n, edges)</text:p>
            <text:p text:style-name="P79">print('MST 邊：', mst) <text:s text:c="3"/># [(1,0,1), (2,1,2), (3,2,3), (6,3,4)]</text:p>
            <text:p text:style-name="P79">print('總權重：', total) <text:s text:c="2"/># 12</text:p>
          </table:table-cell>
        </table:table-row>
      </table:table>
      <text:p text:style-name="P6"/>
      <text:p text:style-name="Standard"/>
      <text:h text:style-name="P10" text:outline-level="2">4-5 Kruskal 時間複雜度 ── 逐步推導</text:h>
      <text:p text:style-name="P6"/>
      <table:table table:name="新增表格68" table:style-name="新增表格68">
        <table:table-column table:style-name="新增表格68.A"/>
        <table:table-row table:style-name="新增表格68.1">
          <table:table-cell table:style-name="新增表格68.A1" office:value-type="string">
            <text:p text:style-name="P11">結論：Kruskal 時間複雜度 = O(E log E)</text:p>
            <text:p text:style-name="P8">也可寫成 O(E log V)，兩者在 Big-O 意義下相等（見後文說明）。</text:p>
          </table:table-cell>
        </table:table-row>
      </table:table>
      <text:p text:style-name="P6"/>
      <table:table table:name="新增表格69" table:style-name="新增表格69">
        <table:table-column table:style-name="新增表格69.A"/>
        <table:table-row table:style-name="新增表格69.1">
          <table:table-cell table:style-name="新增表格69.A1" office:value-type="string">
            <text:p text:style-name="P7">Kruskal 分成兩個獨立階段：</text:p>
            <text:p text:style-name="P36">階段一：排序所有邊</text:p>
            <text:p text:style-name="P36"><text:soft-page-break/>階段二：用 Union-Find 逐條處理每條邊</text:p>
          </table:table-cell>
        </table:table-row>
      </table:table>
      <text:p text:style-name="P6"/>
      <table:table table:name="新增表格70" table:style-name="新增表格70">
        <table:table-column table:style-name="新增表格70.A"/>
        <table:table-row table:style-name="新增表格70.1">
          <table:table-cell table:style-name="新增表格70.A1" office:value-type="string">
            <text:p text:style-name="P7">【階段一】排序所有邊 → O(E log E)</text:p>
            <text:p text:style-name="P8"/>
            <text:p text:style-name="P8">Kruskal 第一步要把圖裡所有 E 條邊按權重由小到大排好。</text:p>
            <text:p text:style-name="P8">排序演算法（Merge Sort / Heap Sort 等）的時間複雜度是 O(n log n)，</text:p>
            <text:p text:style-name="P8">這裡 n 就是邊數 E，所以排序花費 O(E log E)。</text:p>
            <text:p text:style-name="P8"/>
            <text:p text:style-name="P16">直覺理解：E 條邊，每條邊在排序過程中平均被比較 log E 次</text:p>
            <text:p text:style-name="P16">→ 共 E × log E 次比較 → O(E log E)。</text:p>
          </table:table-cell>
        </table:table-row>
      </table:table>
      <text:p text:style-name="P6"/>
      <table:table table:name="新增表格71" table:style-name="新增表格71">
        <table:table-column table:style-name="新增表格71.A"/>
        <table:table-row table:style-name="新增表格71.1">
          <table:table-cell table:style-name="新增表格71.A1" office:value-type="string">
            <text:p text:style-name="P7">【階段二】Union-Find 處理每條邊 → O(E α(V)) ≈ O(E)</text:p>
            <text:p text:style-name="P8"/>
            <text:p text:style-name="P8">排序後逐條掃描，每條邊做一次 Find + 可能一次 Union。</text:p>
            <text:p text:style-name="P8"/>
            <text:p text:style-name="P36">Union-Find 的兩個關鍵優化：</text:p>
            <text:p text:style-name="P41">① 路徑壓縮（Path Compression）</text:p>
            <text:p text:style-name="P8">Find 時把沿途節點直接指向根，讓下次 Find 更快。</text:p>
            <text:p text:style-name="P41">② 按 Rank 合併（Union by Rank）</text:p>
            <text:p text:style-name="P8">Union 時把矮樹接到高樹下面，防止樹長太高。</text:p>
            <text:p text:style-name="P8"/>
            <text:p text:style-name="P8">兩個優化合在一起，每次 Find/Union 幾乎是 O(1)——</text:p>
            <text:p text:style-name="P8">嚴格來說是 O(α(V))，α 是反阿克曼函數，對所有實際情況 α(V) ≤ 4。</text:p>
            <text:p text:style-name="P23">→ E 條邊 × O(α(V)) ≈ O(E)</text:p>
          </table:table-cell>
        </table:table-row>
      </table:table>
      <text:p text:style-name="P6"/>
      <table:table table:name="新增表格72" table:style-name="新增表格72">
        <table:table-column table:style-name="新增表格72.A"/>
        <table:table-column table:style-name="新增表格72.B"/>
        <table:table-column table:style-name="新增表格72.C"/>
        <table:table-column table:style-name="新增表格72.D"/>
        <table:table-row table:style-name="新增表格72.1">
          <table:table-cell table:style-name="新增表格72.A1" office:value-type="string">
            <text:p text:style-name="P81">階段</text:p>
          </table:table-cell>
          <table:table-cell table:style-name="新增表格72.A1" office:value-type="string">
            <text:p text:style-name="P81">操作</text:p>
          </table:table-cell>
          <table:table-cell table:style-name="新增表格72.A1" office:value-type="string">
            <text:p text:style-name="P81">次數</text:p>
          </table:table-cell>
          <table:table-cell table:style-name="新增表格72.A1" office:value-type="string">
            <text:p text:style-name="P81">花費</text:p>
          </table:table-cell>
        </table:table-row>
        <table:table-row table:style-name="新增表格72.1">
          <table:table-cell table:style-name="新增表格72.A2" office:value-type="string">
            <text:p text:style-name="P8">① 排序所有邊</text:p>
          </table:table-cell>
          <table:table-cell table:style-name="新增表格72.A2" office:value-type="string">
            <text:p text:style-name="P8">排序 E 條邊</text:p>
          </table:table-cell>
          <table:table-cell table:style-name="新增表格72.A2" office:value-type="string">
            <text:p text:style-name="P8">1 次</text:p>
          </table:table-cell>
          <table:table-cell table:style-name="新增表格72.A2" office:value-type="string">
            <text:p text:style-name="P8">O(E log E)</text:p>
          </table:table-cell>
        </table:table-row>
        <table:table-row table:style-name="新增表格72.1">
          <table:table-cell table:style-name="新增表格72.A3" office:value-type="string">
            <text:p text:style-name="P8">② Find（查代表人）</text:p>
          </table:table-cell>
          <table:table-cell table:style-name="新增表格72.A3" office:value-type="string">
            <text:p text:style-name="P8">每條邊 2 次</text:p>
          </table:table-cell>
          <table:table-cell table:style-name="新增表格72.A3" office:value-type="string">
            <text:p text:style-name="P8">共 2E 次</text:p>
          </table:table-cell>
          <table:table-cell table:style-name="新增表格72.A3" office:value-type="string">
            <text:p text:style-name="P8">O(E α(V)) ≈ O(E)</text:p>
          </table:table-cell>
        </table:table-row>
        <table:table-row table:style-name="新增表格72.1">
          <table:table-cell table:style-name="新增表格72.A2" office:value-type="string">
            <text:p text:style-name="P8">② Union（合併集合）</text:p>
          </table:table-cell>
          <table:table-cell table:style-name="新增表格72.A2" office:value-type="string">
            <text:p text:style-name="P8">最多 V-1 次</text:p>
          </table:table-cell>
          <table:table-cell table:style-name="新增表格72.A2" office:value-type="string">
            <text:p text:style-name="P8">共 V-1 次</text:p>
          </table:table-cell>
          <table:table-cell table:style-name="新增表格72.A2" office:value-type="string">
            <text:p text:style-name="P8">O(V α(V)) ≈ O(V)</text:p>
          </table:table-cell>
        </table:table-row>
        <table:table-row table:style-name="新增表格72.1">
          <table:table-cell table:style-name="新增表格72.A5" office:value-type="string">
            <text:p text:style-name="P33">總計</text:p>
          </table:table-cell>
          <table:table-cell table:style-name="新增表格72.A5" office:value-type="string">
            <text:p text:style-name="P33">—</text:p>
          </table:table-cell>
          <table:table-cell table:style-name="新增表格72.A5" office:value-type="string">
            <text:p text:style-name="P33">—</text:p>
          </table:table-cell>
          <table:table-cell table:style-name="新增表格72.A5" office:value-type="string">
            <text:p text:style-name="P33">O(E log E) ← 排序主導</text:p>
          </table:table-cell>
        </table:table-row>
      </table:table>
      <text:p text:style-name="P6"/>
      <table:table table:name="新增表格73" table:style-name="新增表格73">
        <table:table-column table:style-name="新增表格73.A"/>
        <table:table-row table:style-name="新增表格73.1">
          <table:table-cell table:style-name="新增表格73.A1" office:value-type="string">
            <text:p text:style-name="P25">為什麼總複雜度由排序主導？</text:p>
            <text:p text:style-name="P8">排序花費 O(E log E)，Union-Find 花費約 O(E)。</text:p>
            <text:p text:style-name="P8">O(E log E) &gt;&gt; O(E)，所以加起來還是 O(E log E)。</text:p>
            <text:p text:style-name="P8"/>
            <text:p text:style-name="P16">類比：搬家打包花 3 小時，搬進去只花 10 分鐘 → 總時間還是 3 小時。</text:p>
            <text:p text:style-name="P63">→ 瓶頸（最慢的那段）決定總花費。</text:p>
          </table:table-cell>
        </table:table-row>
      </table:table>
      <text:p text:style-name="P6"/>
      <table:table table:name="新增表格74" table:style-name="新增表格74">
        <table:table-column table:style-name="新增表格74.A"/>
        <table:table-row table:style-name="新增表格74.1">
          <table:table-cell table:style-name="新增表格74.A1" office:value-type="string">
            <text:p text:style-name="P25">O(E log E) 和 O(E log V) 有差嗎？</text:p>
            <text:p text:style-name="P8">E ≤ V(V-1)/2 ≈ V²，所以：</text:p>
            <text:p text:style-name="P41">log E ≤ log V² = 2 log V = O(log V)</text:p>
            <text:p text:style-name="P8">反過來 E ≥ V-1，所以 log E ≥ log(V-1) ≈ log V。</text:p>
            <text:p text:style-name="P8"><text:soft-page-break/>→ log E 和 log V 差一個常數倍，Big-O 意義下相等：</text:p>
            <text:p text:style-name="P23">O(E log E) = O(E log V)，兩種寫法都被接受。</text:p>
          </table:table-cell>
        </table:table-row>
      </table:table>
      <text:p text:style-name="P6"/>
      <table:table table:name="新增表格75" table:style-name="新增表格75">
        <table:table-column table:style-name="新增表格75.A"/>
        <table:table-row table:style-name="新增表格75.1">
          <table:table-cell table:style-name="新增表格75.A1" office:value-type="string">
            <text:p text:style-name="P33">✅ 一句話記住 Kruskal 複雜度</text:p>
            <text:p text:style-name="P8">Kruskal 的時間由「排序」決定，排 E 條邊就花 O(E log E)，Union-Find 幾乎免費。</text:p>
          </table:table-cell>
        </table:table-row>
      </table:table>
      <text:p text:style-name="P6"/>
      <text:h text:style-name="P9" text:outline-level="1">五、Sollin（Borůvka）演算法 ── 大家同時搶最便宜的邊</text:h>
      <text:p text:style-name="P6"/>
      <text:h text:style-name="P10" text:outline-level="2">5-1 核心概念（超新手版解釋）</text:h>
      <text:p text:style-name="P6"/>
      <text:p text:style-name="P14">想像很多個小部落（每個節點是一個部落），大家同時公告「我要接通的最便宜鄰居」，然後按這些公告同時合併。合併後變成幾個大部落，再重複一輪，直到只剩一個大部落。</text:p>
      <text:p text:style-name="P6"/>
      <text:p text:style-name="P14">這就是 Sollin 最大的特色：不是一個個慢慢來，而是「全體同時行動」，因此非常適合分散式系統（每台電腦各自計算）。</text:p>
      <text:p text:style-name="P6"/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11">Sollin 執行步驟（只有4步）：</text:p>
            <text:p text:style-name="P8">① 初始：每個節點自成一個 Component（一個小圓圈）。</text:p>
            <text:p text:style-name="P8">② 同一輪：每個 Component 掃描自己能連出去的所有邊，找出「最便宜的外連邊」。</text:p>
            <text:p text:style-name="P8">③ 把所有被選中的邊一起加入 MST（若兩個 Component 互選同一條邊，只算一次）。</text:p>
            <text:p text:style-name="P8">④ 合併後重新算 Component，重複步驟②③，直到只剩一個 Component。</text:p>
            <text:p text:style-name="P8">別名：Sollin 和 Borůvka 是同一個演算法，兩個名字都可能出現在考試！</text:p>
          </table:table-cell>
        </table:table-row>
      </table:table>
      <text:p text:style-name="P6"/>
      <text:h text:style-name="P10" text:outline-level="2">5-2 完整圖解範例（5個節點，圖片原題）</text:h>
      <text:p text:style-name="P6"/>
      <text:p text:style-name="P14">範例：5個節點 A, B, C, D, E。各節點最短外連邊如下（來自原始圖片）：</text:p>
      <text:p text:style-name="P6"/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83">各節點選擇的最短外連邊：</text:p>
            <text:p text:style-name="P83"><text:s text:c="2"/>A → (A,D)=14 <text:s text:c="3"/>B → (B,C)=15 <text:s text:c="3"/>C → (C,D)=13</text:p>
            <text:p text:style-name="P83"><text:s text:c="2"/>D → (D,E)=12 <text:s text:c="3"/>E → (D,E)=12 <text:s/>（D 和 E 都選同一條邊！）</text:p>
            <text:p text:style-name="P83">初始 Component：{A} <text:s/>{B} <text:s/>{C} <text:s/>{D} <text:s/>{E}</text:p>
          </table:table-cell>
        </table:table-row>
      </table:table>
      <text:p text:style-name="P6"/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64">Step 1：第一輪：所有 Component 同時找最短外連邊</text:p>
            <text:p text:style-name="P83">Component {A}：最短外連邊 = (A,D)=14 <text:s/>→ 提名 A─D</text:p>
            <text:p text:style-name="P83">Component {B}：最短外連邊 = (B,C)=15 <text:s/>→ 提名 B─C</text:p>
            <text:p text:style-name="P83">Component {C}：最短外連邊 = (C,D)=13 <text:s/>→ 提名 C─D</text:p>
            <text:p text:style-name="P83">Component {D}：最短外連邊 = (D,E)=12 <text:s/>→ 提名 D─E</text:p>
            <text:p text:style-name="P83">Component {E}：最短外連邊 = (D,E)=12 <text:s/>→ 提名 D─E（同一條，只算一次）</text:p>
            <text:p text:style-name="P84"/>
            <text:p text:style-name="P83">本輪加入邊：A─D=14, B─C=15, C─D=13, D─E=12</text:p>
            <text:p text:style-name="P83">合併後：{A,D,E} + {C,D} = {A,C,D,E} <text:s/>再加 {B,C} → {A,B,C,D,E}</text:p>
            <text:p text:style-name="P84"/>
            <text:p text:style-name="P83">最終 MST 樣子：</text:p>
            <text:p text:style-name="P83"><text:s text:c="2"/>B──15──C──13──D──12──E</text:p>
            <text:p text:style-name="P83"><text:s text:c="14"/>│</text:p>
            <text:p text:style-name="P83"><text:s text:c="13"/>14</text:p>
            <text:p text:style-name="P83"><text:s text:c="14"/>│</text:p>
            <text:p text:style-name="P83"><text:s text:c="14"/>A</text:p>
          </table:table-cell>
        </table:table-row>
      </table:table>
      <text:p text:style-name="P6"/>
      <table:table table:name="表格40" table:style-name="表格40">
        <table:table-column table:style-name="表格40.A"/>
        <table:table-row table:style-name="表格40.1">
          <table:table-cell table:style-name="表格40.A1" office:value-type="string">
            <text:p text:style-name="P73">✅ 一輪就完成！所有節點連成一個 Component</text:p>
            <text:p text:style-name="P74">MST 邊集合：A─D=14, B─C=15, C─D=13, D─E=12</text:p>
            <text:p text:style-name="P75">總權重：14 + 15 + 13 + 12 = 54</text:p>
            <text:p text:style-name="P76">邊數驗證：V-1 = 5-1 = 4 條 <text:s/>✅</text:p>
          </table:table-cell>
        </table:table-row>
      </table:table>
      <text:p text:style-name="P6"/>
      <text:h text:style-name="P87" text:outline-level="2"><text:soft-page-break/><text:span text:style-name="T34">5-3 需要兩輪的範例</text:span></text:h>
      <text:p text:style-name="P6"/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83">範例圖：A─1─B，B─4─C，C─2─D，A─5─D</text:p>
            <text:p text:style-name="P83">初始 Component：{A} <text:s/>{B} <text:s/>{C} <text:s/>{D}</text:p>
            <text:p text:style-name="P84"/>
            <text:p text:style-name="P83">───── 第一輪 ──────────────────────────────────────────</text:p>
            <text:p text:style-name="P83">{A}：最短外連邊 = A─B=1 <text:s/>→ 提名 A─B</text:p>
            <text:p text:style-name="P83">{B}：最短外連邊 = A─B=1 <text:s/>→ 提名 A─B（同一條）</text:p>
            <text:p text:style-name="P83">{C}：最短外連邊 = C─D=2 <text:s/>→ 提名 C─D</text:p>
            <text:p text:style-name="P83">{D}：最短外連邊 = C─D=2 <text:s/>→ 提名 C─D（同一條）</text:p>
            <text:p text:style-name="P83">加入：A─B=1, C─D=2</text:p>
            <text:p text:style-name="P83">合併後 Component：{A,B} <text:s/>{C,D}</text:p>
            <text:p text:style-name="P84"/>
            <text:p text:style-name="P83">───── 第二輪 ──────────────────────────────────────────</text:p>
            <text:p text:style-name="P83">{A,B}：最短外連邊 = B─C=4 <text:s/>→ 提名 B─C</text:p>
            <text:p text:style-name="P83">{C,D}：最短外連邊 = B─C=4 <text:s/>→ 提名 B─C（同一條）</text:p>
            <text:p text:style-name="P83">加入：B─C=4</text:p>
            <text:p text:style-name="P83">合併後 Component：{A,B,C,D} <text:s/>← 只剩一個！完成！</text:p>
            <text:p text:style-name="P84"/>
            <text:p text:style-name="P83">MST = A─B=1, C─D=2, B─C=4 <text:s text:c="4"/>總重 = 7</text:p>
          </table:table-cell>
        </table:table-row>
      </table:table>
      <text:p text:style-name="P6"/>
      <text:h text:style-name="P10" text:outline-level="2">5-4 Sollin 程式實作（Python）</text:h>
      <text:p text:style-name="P6"/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79">def sollin(n, edges):</text:p>
            <text:p text:style-name="P79"><text:s text:c="4"/>"""</text:p>
            <text:p text:style-name="P79"><text:s text:c="4"/>n: <text:s text:c="4"/>節點數量</text:p>
            <text:p text:style-name="P79"><text:s text:c="4"/>edges: [(權重, u, v), ...]</text:p>
            <text:p text:style-name="P79"><text:s text:c="4"/>"""</text:p>
            <text:p text:style-name="P79"><text:s text:c="4"/>parent = list(range(n)) <text:s text:c="2"/># 每個節點的代表人</text:p>
            <text:p text:style-name="P80"/>
            <text:p text:style-name="P79"><text:s text:c="4"/>def find(x):</text:p>
            <text:p text:style-name="P79"><text:s text:c="8"/>while parent[x] != x:</text:p>
            <text:p text:style-name="P79"><text:s text:c="12"/>parent[x] = parent[parent[x]] <text:s text:c="2"/># 路徑壓縮</text:p>
            <text:p text:style-name="P79"><text:s text:c="12"/>x = parent[x]</text:p>
            <text:p text:style-name="P79"><text:s text:c="8"/>return x</text:p>
            <text:p text:style-name="P80"/>
            <text:p text:style-name="P79"><text:s text:c="4"/>def union(x, y):</text:p>
            <text:p text:style-name="P79"><text:s text:c="8"/>px, py = find(x), find(y)</text:p>
            <text:p text:style-name="P79"><text:s text:c="8"/>if px == py: return False</text:p>
            <text:p text:style-name="P79"><text:s text:c="8"/>parent[px] = py</text:p>
            <text:p text:style-name="P79"><text:s text:c="8"/>return True</text:p>
            <text:p text:style-name="P80"/>
            <text:p text:style-name="P79"><text:s text:c="4"/>mst = []</text:p>
            <text:p text:style-name="P79"><text:s text:c="4"/>total = 0</text:p>
            <text:p text:style-name="P79"><text:s text:c="4"/>while True:</text:p>
            <text:p text:style-name="P79"><text:s text:c="8"/>comps = len(set(find(i) for i in range(n)))</text:p>
            <text:p text:style-name="P79"><text:s text:c="8"/>if comps == 1:</text:p>
            <text:p text:style-name="P79"><text:s text:c="12"/>break</text:p>
            <text:p text:style-name="P79"><text:s text:c="8"/>cheapest = {}</text:p>
            <text:p text:style-name="P79"><text:s text:c="8"/>for w, u, v in edges:</text:p>
            <text:p text:style-name="P79"><text:s text:c="12"/>ru, rv = find(u), find(v)</text:p>
            <text:p text:style-name="P79"><text:s text:c="12"/>if ru == rv: continue</text:p>
            <text:p text:style-name="P79"><text:s text:c="12"/>if ru not in cheapest or w &lt; cheapest[ru][0]: cheapest[ru] = (w, u, v)</text:p>
            <text:p text:style-name="P79"><text:s text:c="12"/>if rv not in cheapest or w &lt; cheapest[rv][0]: cheapest[rv] = (w, u, v)</text:p>
            <text:p text:style-name="P79"><text:s text:c="8"/>for w, u, v in cheapest.values():</text:p>
            <text:p text:style-name="P79"><text:s text:c="12"/>if union(u, v):</text:p>
            <text:p text:style-name="P79"><text:s text:c="16"/>mst.append((w, u, v))</text:p>
            <text:p text:style-name="P79"><text:s text:c="16"/>total += w</text:p>
            <text:p text:style-name="P79"><text:s text:c="4"/>return mst, total</text:p>
            <text:p text:style-name="P80"><text:soft-page-break/></text:p>
            <text:p text:style-name="P79"># ─── 測試 ────────────────────────────────────────────</text:p>
            <text:p text:style-name="P79">n = 4 <text:s/># A=0, B=1, C=2, D=3</text:p>
            <text:p text:style-name="P79">edges = [(1,0,1),(4,0,3),(4,1,2),(2,2,3)] <text:s/># AB=1,AD=4,BC=4,CD=2</text:p>
            <text:p text:style-name="P79">mst, total = sollin(n, edges)</text:p>
            <text:p text:style-name="P79">print('MST:', mst) <text:s text:c="6"/># 包含 AB=1, CD=2, BC=4</text:p>
            <text:p text:style-name="P79">print('Total:', total) <text:s text:c="2"/># 7</text:p>
          </table:table-cell>
        </table:table-row>
      </table:table>
      <text:p text:style-name="P6"/>
      <text:h text:style-name="P10" text:outline-level="2">5-5 為什麼 Sollin 適合分散式計算？</text:h>
      <text:p text:style-name="P6"/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83">Prim（必須一個中央節點主控）： <text:s text:c="3"/>Sollin（每台電腦各自計算）：</text:p>
            <text:p text:style-name="P83">中央節點 A <text:s text:c="24"/>電腦1 <text:s text:c="2"/>電腦2 <text:s text:c="2"/>電腦3 <text:s text:c="2"/>電腦4</text:p>
            <text:p text:style-name="P83"><text:s text:c="3"/>│ <text:s text:c="32"/>↓ <text:s text:c="6"/>↓ <text:s text:c="6"/>↓ <text:s text:c="6"/>↓</text:p>
            <text:p text:style-name="P83">一步步往外 <text:s text:c="23"/>各自找自己最短外連邊（同時進行！）</text:p>
            <text:p text:style-name="P83">只有一個節點在工作 <text:s text:c="18"/>↓ <text:s text:c="6"/>↓ <text:s text:c="6"/>↓ <text:s text:c="6"/>↓</text:p>
            <text:p text:style-name="P83">→ 無法平行化 <text:s text:c="22"/>統一回報 → 同時合併</text:p>
            <text:p text:style-name="P84"/>
            <text:p text:style-name="P83">Sollin 每輪所有 Component 同時計算，不需要一個中央控制點，</text:p>
            <text:p text:style-name="P83">因此特別適合 Google Maps 路網計算、超大規模網路拓樸分析。</text:p>
          </table:table-cell>
        </table:table-row>
      </table:table>
      <text:p text:style-name="P6"/>
      <text:p text:style-name="Standard"/>
      <text:h text:style-name="P10" text:outline-level="2">5-6 Sollin 時間複雜度 ── 逐步推導</text:h>
      <text:p text:style-name="P6"/>
      <table:table table:name="新增表格76" table:style-name="新增表格76">
        <table:table-column table:style-name="新增表格76.A"/>
        <table:table-row table:style-name="新增表格76.1">
          <table:table-cell table:style-name="新增表格76.A1" office:value-type="string">
            <text:p text:style-name="P11">結論：Sollin 時間複雜度 = O(E log V)</text:p>
            <text:p text:style-name="P8">核心關鍵：每一輪把 Component 數量至少減半，所以最多只跑 log V 輪。</text:p>
          </table:table-cell>
        </table:table-row>
      </table:table>
      <text:p text:style-name="P6"/>
      <table:table table:name="新增表格77" table:style-name="新增表格77">
        <table:table-column table:style-name="新增表格77.A"/>
        <table:table-row table:style-name="新增表格77.1">
          <table:table-cell table:style-name="新增表格77.A1" office:value-type="string">
            <text:p text:style-name="P7">【關鍵觀察一】每輪 Component 數量至少減半</text:p>
            <text:p text:style-name="P8"/>
            <text:p text:style-name="P8">初始：V 個 Component（每個節點自成一組）。</text:p>
            <text:p text:style-name="P8">每個 Component 都找一條最短外連邊，並與另一個 Component 合併。</text:p>
            <text:p text:style-name="P8"/>
            <text:p text:style-name="P36">最壞情況：每次剛好兩兩配對合併：</text:p>
            <text:p text:style-name="P8">輪次 0：V 個 Component（例如 V = 8）</text:p>
            <text:p text:style-name="P8">輪次 1：最多剩 V/2 個（例如 4 個）</text:p>
            <text:p text:style-name="P8">輪次 2：最多剩 V/4 個（例如 2 個）</text:p>
            <text:p text:style-name="P23">輪次 3：最多剩 V/8 個（例如 1 個）← 完成！</text:p>
            <text:p text:style-name="P8"/>
            <text:p text:style-name="P63">→ 最多只需要 ⌈log₂ V⌉ 輪就能全部合併完。</text:p>
          </table:table-cell>
        </table:table-row>
      </table:table>
      <text:p text:style-name="P6"/>
      <table:table table:name="新增表格78" table:style-name="新增表格78">
        <table:table-column table:style-name="新增表格78.A"/>
        <table:table-column table:style-name="新增表格78.B"/>
        <table:table-column table:style-name="新增表格78.C"/>
        <table:table-column table:style-name="新增表格78.D"/>
        <table:table-row table:style-name="新增表格78.1">
          <table:table-cell table:style-name="新增表格78.A1" office:value-type="string">
            <text:p text:style-name="P81">輪次</text:p>
          </table:table-cell>
          <table:table-cell table:style-name="新增表格78.A1" office:value-type="string">
            <text:p text:style-name="P81">Component 數量（上界）</text:p>
          </table:table-cell>
          <table:table-cell table:style-name="新增表格78.A1" office:value-type="string">
            <text:p text:style-name="P81">本輪操作</text:p>
          </table:table-cell>
          <table:table-cell table:style-name="新增表格78.A1" office:value-type="string">
            <text:p text:style-name="P81">本輪花費</text:p>
          </table:table-cell>
        </table:table-row>
        <table:table-row table:style-name="新增表格78.1">
          <table:table-cell table:style-name="新增表格78.A2" office:value-type="string">
            <text:p text:style-name="P8">第 1 輪</text:p>
          </table:table-cell>
          <table:table-cell table:style-name="新增表格78.A2" office:value-type="string">
            <text:p text:style-name="P8">V → ≤ V/2</text:p>
          </table:table-cell>
          <table:table-cell table:style-name="新增表格78.A2" office:value-type="string">
            <text:p text:style-name="P8">掃所有 E 條邊</text:p>
          </table:table-cell>
          <table:table-cell table:style-name="新增表格78.A2" office:value-type="string">
            <text:p text:style-name="P8">O(E)</text:p>
          </table:table-cell>
        </table:table-row>
        <table:table-row table:style-name="新增表格78.1">
          <table:table-cell table:style-name="新增表格78.A3" office:value-type="string">
            <text:p text:style-name="P8">第 2 輪</text:p>
          </table:table-cell>
          <table:table-cell table:style-name="新增表格78.A3" office:value-type="string">
            <text:p text:style-name="P8">≤ V/2 → ≤ V/4</text:p>
          </table:table-cell>
          <table:table-cell table:style-name="新增表格78.A3" office:value-type="string">
            <text:p text:style-name="P8">掃所有 E 條邊</text:p>
          </table:table-cell>
          <table:table-cell table:style-name="新增表格78.A3" office:value-type="string">
            <text:p text:style-name="P8">O(E)</text:p>
          </table:table-cell>
        </table:table-row>
        <table:table-row table:style-name="新增表格78.1">
          <table:table-cell table:style-name="新增表格78.A2" office:value-type="string">
            <text:p text:style-name="P8">第 k 輪</text:p>
          </table:table-cell>
          <table:table-cell table:style-name="新增表格78.A2" office:value-type="string">
            <text:p text:style-name="P8">≤ V/2^(k-1)</text:p>
          </table:table-cell>
          <table:table-cell table:style-name="新增表格78.A2" office:value-type="string">
            <text:p text:style-name="P8">掃所有 E 條邊</text:p>
          </table:table-cell>
          <table:table-cell table:style-name="新增表格78.A2" office:value-type="string">
            <text:p text:style-name="P8">O(E)</text:p>
          </table:table-cell>
        </table:table-row>
        <table:table-row table:style-name="新增表格78.1">
          <table:table-cell table:style-name="新增表格78.A3" office:value-type="string">
            <text:p text:style-name="P8">共幾輪？</text:p>
          </table:table-cell>
          <table:table-cell table:style-name="新增表格78.A3" office:value-type="string">
            <text:p text:style-name="P8">最多 log V 輪</text:p>
          </table:table-cell>
          <table:table-cell table:style-name="新增表格78.A3" office:value-type="string">
            <text:p text:style-name="P8">—</text:p>
          </table:table-cell>
          <table:table-cell table:style-name="新增表格78.A3" office:value-type="string">
            <text:p text:style-name="P8">—</text:p>
          </table:table-cell>
        </table:table-row>
        <text:soft-page-break/>
        <table:table-row table:style-name="新增表格78.1">
          <table:table-cell table:style-name="新增表格78.A6" office:value-type="string">
            <text:p text:style-name="P33">總計</text:p>
          </table:table-cell>
          <table:table-cell table:style-name="新增表格78.A6" office:value-type="string">
            <text:p text:style-name="P33">—</text:p>
          </table:table-cell>
          <table:table-cell table:style-name="新增表格78.A6" office:value-type="string">
            <text:p text:style-name="P33">—</text:p>
          </table:table-cell>
          <table:table-cell table:style-name="新增表格78.A6" office:value-type="string">
            <text:p text:style-name="P33">log V 輪 × O(E) = O(E log V)</text:p>
          </table:table-cell>
        </table:table-row>
      </table:table>
      <text:p text:style-name="P6"/>
      <table:table table:name="新增表格79" table:style-name="新增表格79">
        <table:table-column table:style-name="新增表格79.A"/>
        <table:table-row table:style-name="新增表格79.1">
          <table:table-cell table:style-name="新增表格79.A1" office:value-type="string">
            <text:p text:style-name="P7">【關鍵觀察二】每一輪做什麼？花多少時間？</text:p>
            <text:p text:style-name="P8"/>
            <text:p text:style-name="P8">每一輪，所有 Component 同時找自己的最短外連邊，然後合併。</text:p>
            <text:p text:style-name="P8"/>
            <text:p text:style-name="P36">一輪裡的操作：</text:p>
            <text:p text:style-name="P8">① 掃描所有 E 條邊，替每個 Component 找最短外連邊 → O(E)</text:p>
            <text:p text:style-name="P8">② 把選出的邊加入 MST，合併 Component（Union-Find） → O(V α(V)) ≈ O(V)</text:p>
            <text:p text:style-name="P8">③ 因為連通圖必有 E ≥ V−1，而通常 E ≥ V（鏈狀圖例外），O(E) 主導 → 每輪花費 O(E)</text:p>
            <text:p text:style-name="P8"/>
            <text:p text:style-name="P23">→ 每輪 O(E)，共最多 log V 輪 → 總計 O(E log V)</text:p>
          </table:table-cell>
        </table:table-row>
      </table:table>
      <text:p text:style-name="P6"/>
      <table:table table:name="新增表格80" table:style-name="新增表格80">
        <table:table-column table:style-name="新增表格80.A"/>
        <table:table-row table:style-name="新增表格80.1">
          <table:table-cell table:style-name="新增表格80.A1" office:value-type="string">
            <text:p text:style-name="P25">用數字感受一下（V = 1024 的圖）：</text:p>
            <text:p text:style-name="P8"/>
            <text:p text:style-name="P8">初始： 1024 個 Component</text:p>
            <text:p text:style-name="P8">第 1 輪：最多 512 個</text:p>
            <text:p text:style-name="P8">第 2 輪：最多 256 個</text:p>
            <text:p text:style-name="P16">......</text:p>
            <text:p text:style-name="P23">第 10 輪：最多 1 個 → 完成！</text:p>
            <text:p text:style-name="P8"/>
            <text:p text:style-name="P8">log₂(1024) = 10，所以最多只需要 10 輪。</text:p>
            <text:p text:style-name="P63">每輪掃所有 E 條邊 → 總計 10 × E = O(E log V) 次操作。</text:p>
          </table:table-cell>
        </table:table-row>
      </table:table>
      <text:p text:style-name="P6"/>
      <table:table table:name="新增表格81" table:style-name="新增表格81">
        <table:table-column table:style-name="新增表格81.A"/>
        <table:table-row table:style-name="新增表格81.1">
          <table:table-cell table:style-name="新增表格81.A1" office:value-type="string">
            <text:p text:style-name="P7">與 Kruskal、Prim 的複雜度比較</text:p>
            <text:p text:style-name="P8"/>
            <text:p text:style-name="P8">Sollin O(E log V) vs Kruskal O(E log E) = O(E log V) → 相同！</text:p>
            <text:p text:style-name="P8">Sollin O(E log V) vs Prim Heap 版 O(E log V) → 相同！</text:p>
            <text:p text:style-name="P8"/>
            <text:p text:style-name="P36">那 Sollin 的優勢是什麼？</text:p>
            <text:p text:style-name="P8">每一輪的操作是「所有 Component 同時進行」，天然適合平行化。</text:p>
            <text:p text:style-name="P8">Prim 和 Kruskal 是序列演算法（一步一步），難以平行化。</text:p>
            <text:p text:style-name="P23">→ 分散式環境下，Sollin 每輪可分給多台電腦同時跑，</text:p>
            <text:p text:style-name="P23">大幅降低實際牆鐘時間（Wall-clock time）。</text:p>
          </table:table-cell>
        </table:table-row>
      </table:table>
      <text:p text:style-name="P6"/>
      <table:table table:name="新增表格82" table:style-name="新增表格82">
        <table:table-column table:style-name="新增表格82.A"/>
        <table:table-row table:style-name="新增表格82.1">
          <table:table-cell table:style-name="新增表格82.A1" office:value-type="string">
            <text:p text:style-name="P33">✅ 一句話記住 Sollin 複雜度</text:p>
            <text:p text:style-name="P8">每輪掃全部 E 條邊 O(E)，最多跑 log V 輪（每輪 Component 至少減半）→ O(E log V)。</text:p>
          </table:table-cell>
        </table:table-row>
      </table:table>
      <text:p text:style-name="P6"/>
      <text:h text:style-name="P9" text:outline-level="1">六、113閩 Q5 ── Kruskal 公職真題完整解題</text:h>
      <text:p text:style-name="P6"/>
      <text:h text:style-name="P10" text:outline-level="2">6-1 題目</text:h>
      <text:p text:style-name="P6"/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88">題目：</text:p>
            <text:p text:style-name="P88">圖 G 有 7 個節點：a, b, c, d, e, f, g</text:p>
            <text:p text:style-name="P88">所有邊（格式：節點─節點 = 權重）：</text:p>
            <text:p text:style-name="P88">a─b=13　　a─c=9　　a─d=10　　b─d=16　　c─d=12</text:p>
            <text:p text:style-name="P88">c─e=2　　　c─f=3　　　d─g=18　　　e─f=4　　　f─g=6</text:p>
            <text:p text:style-name="P84"/>
            <text:p text:style-name="P88">請用 Kruskal 演算法找出 MST 及總權重。</text:p>
          </table:table-cell>
        </table:table-row>
      </table:table>
      <text:p text:style-name="P6"/>
      <text:h text:style-name="P10" text:outline-level="2">6-2 先畫出圖的結構</text:h>
      <text:p text:style-name="P6"/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83">圖的連線示意（看懂這張圖，解題就簡單了）：</text:p>
            <text:p text:style-name="P83"><text:s text:c="13"/>b</text:p>
            <text:p text:style-name="P83"><text:s text:c="12"/>/ \</text:p>
            <text:p text:style-name="P83"><text:s text:c="10"/>13 <text:s text:c="2"/>16</text:p>
            <text:p text:style-name="P83"><text:s text:c="10"/>/ <text:s text:c="4"/>\</text:p>
            <text:p text:style-name="P83"><text:s text:c="9"/>a──10───d──18──g</text:p>
            <text:p text:style-name="P83"><text:s text:c="10"/>\ <text:s text:c="5"/>│ <text:s text:c="6"/>\</text:p>
            <text:p text:style-name="P83"><text:s text:c="11"/>9 <text:s text:c="3"/>12 <text:s text:c="7"/>6</text:p>
            <text:p text:style-name="P83"><text:s text:c="12"/>\ <text:s text:c="3"/>│ <text:s text:c="8"/>\</text:p>
            <text:p text:style-name="P83"><text:s text:c="13"/>c──3──f────6───+</text:p>
            <text:p text:style-name="P83"><text:s text:c="13"/>│ <text:s text:c="5"/>│</text:p>
            <text:p text:style-name="P83"><text:s text:c="13"/>2 <text:s text:c="5"/>4</text:p>
            <text:p text:style-name="P83"><text:s text:c="13"/>│ <text:s text:c="5"/>│</text:p>
            <text:p text:style-name="P83"><text:s text:c="13"/>e──────+</text:p>
            <text:p text:style-name="P84"/>
            <text:p text:style-name="P83">(c─e=2, e─f=4, c─f=3)</text:p>
            <text:p text:style-name="P83">注意：c 連著好幾條邊！c─e=2, c─f=3, c─d=12, a─c=9</text:p>
            <text:p text:style-name="P83"><text:s text:c="6"/>這些是解題時最容易混淆的地方，要特別注意。</text:p>
          </table:table-cell>
        </table:table-row>
      </table:table>
      <text:p text:style-name="P6"/>
      <text:h text:style-name="P10" text:outline-level="2">6-3 Step 1：所有邊排序</text:h>
      <text:p text:style-name="P6"/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83">10條邊，依權重由小到大排序：</text:p>
            <text:p text:style-name="P84"/>
            <text:p text:style-name="P83">排序 <text:s/>邊 <text:s text:c="10"/>權重 <text:s text:c="3"/>說明</text:p>
            <text:p text:style-name="P83">────────────────────────────────────────</text:p>
            <text:p text:style-name="P83"><text:s text:c="2"/>1 <text:s text:c="2"/>(c, e) <text:s text:c="8"/>2 <text:s text:c="3"/>← c 和 e 直接連，最便宜</text:p>
            <text:p text:style-name="P83"><text:s text:c="2"/>2 <text:s text:c="2"/>(c, f) <text:s text:c="8"/>3 <text:s text:c="3"/>← c 和 f 直接連</text:p>
            <text:p text:style-name="P83"><text:s text:c="2"/>3 <text:s text:c="2"/>(e, f) <text:s text:c="8"/>4 <text:s text:c="3"/>← e 和 f 直接連</text:p>
            <text:p text:style-name="P83"><text:s text:c="2"/>4 <text:s text:c="2"/>(f, g) <text:s text:c="8"/>6 <text:s text:c="3"/>← f 和 g 直接連</text:p>
            <text:p text:style-name="P83"><text:s text:c="2"/>5 <text:s text:c="2"/>(a, c) <text:s text:c="8"/>9 <text:s text:c="3"/>← a 和 c 直接連</text:p>
            <text:p text:style-name="P83"><text:s text:c="2"/>6 <text:s text:c="2"/>(a, d) <text:s text:c="7"/>10 <text:s text:c="3"/>← a 和 d 直接連</text:p>
            <text:p text:style-name="P83"><text:s text:c="2"/>7 <text:s text:c="2"/>(c, d) <text:s text:c="7"/>12 <text:s text:c="3"/>← c 和 d 直接連</text:p>
            <text:p text:style-name="P83"><text:s text:c="2"/>8 <text:s text:c="2"/>(a, b) <text:s text:c="7"/>13 <text:s text:c="3"/>← a 和 b 直接連</text:p>
            <text:p text:style-name="P83"><text:s text:c="2"/>9 <text:s text:c="2"/>(b, d) <text:s text:c="7"/>16</text:p>
            <text:p text:style-name="P83"><text:s/>10 <text:s text:c="2"/>(d, g) <text:s text:c="7"/>18 <text:s text:c="3"/>← 最貴</text:p>
          </table:table-cell>
        </table:table-row>
      </table:table>
      <text:p text:style-name="P6"/>
      <text:h text:style-name="P87" text:outline-level="2"><text:soft-page-break/><text:span text:style-name="T34">6-4 Step 2：逐條執行 Kruskal</text:span></text:h>
      <text:p text:style-name="P6"/>
      <table:table table:name="表格47" table:style-name="表格47">
        <table:table-column table:style-name="表格47.A"/>
        <table:table-row table:style-name="表格47.1">
          <table:table-cell table:style-name="表格47.A1" office:value-type="string">
            <text:p text:style-name="P85">Step 1：加入 (c,e)=2</text:p>
            <text:p text:style-name="P46">Find(c)=c <text:s text:c="3"/>Find(e)=e <text:s text:c="3"/>← 不同集合，可以加！</text:p>
            <text:p text:style-name="P46">Union(c, e)</text:p>
            <text:p text:style-name="P46">集合狀態：{a} {b} {c,e} {d} {f} {g}</text:p>
            <text:p text:style-name="P46">已選邊（1條）：(c,e)=2</text:p>
            <text:p text:style-name="P46">目前 MST： <text:s/>c──2──e</text:p>
          </table:table-cell>
        </table:table-row>
      </table:table>
      <text:p text:style-name="P6"/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85">Step 2：加入 (c,f)=3</text:p>
            <text:p text:style-name="P46">Find(c)=c <text:s text:c="3"/>Find(f)=f <text:s text:c="3"/>← 不同集合，可以加！</text:p>
            <text:p text:style-name="P46">Union(c, f)</text:p>
            <text:p text:style-name="P46">集合狀態：{a} {b} {c,e,f} {d} {g}</text:p>
            <text:p text:style-name="P46">已選邊（2條）：(c,e)=2, (c,f)=3</text:p>
            <text:p text:style-name="P46">目前 MST： <text:s/>e──2──c──3──f</text:p>
          </table:table-cell>
        </table:table-row>
      </table:table>
      <text:p text:style-name="P6"/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86">Step 3：看 (e,f)=4 → ⛔ 跳過！</text:p>
            <text:p text:style-name="P46">Find(e)=c <text:s text:c="3"/>Find(f)=c <text:s text:c="3"/>← 相同集合！</text:p>
            <text:p text:style-name="P46">為什麼會同集合？</text:p>
            <text:p text:style-name="P46"><text:s text:c="2"/>上面把 c,e 合併成一組，又把 c,f 合併進來，</text:p>
            <text:p text:style-name="P46"><text:s text:c="2"/>所以 e、c、f 都在同一組了。</text:p>
            <text:p text:style-name="P46">若加入 e─f：</text:p>
            <text:p text:style-name="P46"><text:s text:c="2"/>e──2──c──3──f</text:p>
            <text:p text:style-name="P46"><text:s text:c="2"/>└───────4───┘ <text:s/>← 形成三角形迴路！</text:p>
            <text:p text:style-name="P46">⛔ 跳過 (e,f)=4</text:p>
          </table:table-cell>
        </table:table-row>
      </table:table>
      <text:p text:style-name="P6"/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85">Step 4：加入 (f,g)=6</text:p>
            <text:p text:style-name="P46">Find(f)=c <text:s text:c="3"/>Find(g)=g <text:s text:c="3"/>← 不同集合，可以加！</text:p>
            <text:p text:style-name="P46">Union(f, g)</text:p>
            <text:p text:style-name="P46">集合狀態：{a} {b} {c,e,f,g} {d}</text:p>
            <text:p text:style-name="P46">已選邊（3條）：(c,e)=2, (c,f)=3, (f,g)=6</text:p>
            <text:p text:style-name="P46">目前 MST： <text:s/>e──2──c──3──f──6──g</text:p>
          </table:table-cell>
        </table:table-row>
      </table:table>
      <text:p text:style-name="P6"/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85">Step 5：加入 (a,c)=9</text:p>
            <text:p text:style-name="P46">Find(a)=a <text:s text:c="3"/>Find(c)=c <text:s text:c="3"/>← 不同集合，可以加！</text:p>
            <text:p text:style-name="P46">Union(a, c)</text:p>
            <text:p text:style-name="P46">集合狀態：{a,c,e,f,g} {b} {d}</text:p>
            <text:p text:style-name="P46">已選邊（4條）：...+(a,c)=9</text:p>
            <text:p text:style-name="P46">目前 MST： <text:s text:c="4"/>a──9──c──3──f──6──g</text:p>
            <text:p text:style-name="P46"><text:s text:c="19"/>│</text:p>
            <text:p text:style-name="P46"><text:s text:c="19"/>2</text:p>
            <text:p text:style-name="P46"><text:s text:c="19"/>│</text:p>
            <text:p text:style-name="P46"><text:s text:c="19"/>e</text:p>
          </table:table-cell>
        </table:table-row>
      </table:table>
      <text:p text:style-name="P6"/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85">Step 6：加入 (a,d)=10</text:p>
            <text:p text:style-name="P46">Find(a)=a <text:s text:c="3"/>Find(d)=d <text:s text:c="3"/>← 不同集合，可以加！</text:p>
            <text:p text:style-name="P46">Union(a, d)</text:p>
            <text:p text:style-name="P46">集合狀態：{a,c,d,e,f,g} {b}</text:p>
            <text:p text:style-name="P46">已選邊（5條）：...+(a,d)=10</text:p>
            <text:p text:style-name="P46">目前 MST： <text:s text:c="4"/>d──10──a──9──c──3──f──6──g</text:p>
            <text:p text:style-name="P46"><text:s text:c="20"/>│ <text:s text:c="18"/>2</text:p>
            <text:p text:style-name="P46"><text:s text:c="20"/>│ <text:s text:c="18"/>│</text:p>
            <text:p text:style-name="P46"><text:s text:c="20"/>d <text:s text:c="18"/>e</text:p>
          </table:table-cell>
        </table:table-row>
      </table:table>
      <text:p text:style-name="P6"/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86">Step 7：看 (c,d)=12 → ⛔ 跳過！</text:p>
            <text:p text:style-name="P47"><text:soft-page-break/><text:span text:style-name="T18">Find(c)=a <text:s text:c="3"/>Find(d)=a <text:s text:c="3"/>← 相同集合！</text:span></text:p>
            <text:p text:style-name="P46">為什麼？</text:p>
            <text:p text:style-name="P46"><text:s text:c="2"/>步驟5：a 和 c 合併 → {a,c,...}</text:p>
            <text:p text:style-name="P46"><text:s text:c="2"/>步驟6：a 和 d 合併 → {a,c,d,...}</text:p>
            <text:p text:style-name="P46"><text:s text:c="2"/>現在 c 和 d 都在同一組了！</text:p>
            <text:p text:style-name="P46">若加入 c─d：c─a─d─c 形成三角形迴路！</text:p>
            <text:p text:style-name="P46">⛔ 跳過 (c,d)=12</text:p>
          </table:table-cell>
        </table:table-row>
      </table:table>
      <text:p text:style-name="P6"/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85">Step 8：加入 (a,b)=13 ← 最後一條！</text:p>
            <text:p text:style-name="P46">Find(a)=a <text:s text:c="3"/>Find(b)=b <text:s text:c="3"/>← 不同集合，可以加！</text:p>
            <text:p text:style-name="P46">Union(a, b)</text:p>
            <text:p text:style-name="P46">集合狀態：{a,b,c,d,e,f,g} <text:s/>← 所有節點都在同一組！</text:p>
            <text:p text:style-name="P46">已選邊（6條）= V-1 = 7-1 = 6 <text:s/>✅ <text:s/>完成！</text:p>
            <text:p text:style-name="P46">最終 MST：</text:p>
            <text:p text:style-name="P46"><text:s text:c="2"/>b──13──a──9──c──3──f──6──g</text:p>
            <text:p text:style-name="P46"><text:s text:c="9"/>│ <text:s text:c="3"/>│</text:p>
            <text:p text:style-name="P46"><text:s text:c="8"/>10 <text:s text:c="3"/>2</text:p>
            <text:p text:style-name="P46"><text:s text:c="9"/>│ <text:s text:c="3"/>│</text:p>
            <text:p text:style-name="P46"><text:s text:c="9"/>d <text:s text:c="3"/>e</text:p>
          </table:table-cell>
        </table:table-row>
      </table:table>
      <text:p text:style-name="P6"/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73">✅ 最終答案</text:p>
            <text:p text:style-name="P74">MST 邊集合：(c,e)=2, (c,f)=3, (f,g)=6, (a,c)=9, (a,d)=10, (a,b)=13</text:p>
            <text:p text:style-name="P75">總權重：2 + 3 + 6 + 9 + 10 + 13 = 43</text:p>
            <text:p text:style-name="P89">邊數驗證：V-1 = 7-1 = 6 條 <text:s/>✅</text:p>
            <text:p text:style-name="P75">跳過原因整理：</text:p>
            <text:p text:style-name="P90"><text:s text:c="2"/>(e,f)=4 → c、e、f 已同集合，加了 e─c─f─e 成三角形</text:p>
            <text:p text:style-name="P91"><text:s text:c="2"/>(c,d)=12 → c、d 已透過 a 相連，加了 c─a─d─c 成三角形</text:p>
          </table:table-cell>
        </table:table-row>
      </table:table>
      <text:p text:style-name="P6"/>
      <text:p text:style-name="Standard"/>
      <text:h text:style-name="P9" text:outline-level="1">七、考試速查卡 ── 最終背誦版</text:h>
      <text:p text:style-name="P6"/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11">⭐ Prim 三句口訣</text:p>
            <text:p text:style-name="P92">① 從任一節點出發，每次選「T 內 → T 外」最小邊。</text:p>
            <text:p text:style-name="P92">② 天然防止 Cycle，不需 Union-Find，也不需額外判斷。</text:p>
            <text:p text:style-name="P93">③ 矩陣版 O(V²)；Heap 版 O(E log V)。稠密圖用矩陣版更省。</text:p>
          </table:table-cell>
        </table:table-row>
      </table:table>
      <text:p text:style-name="P6"/>
      <table:table table:name="表格57" table:style-name="表格57">
        <table:table-column table:style-name="表格57.A"/>
        <table:table-row table:style-name="表格57.1">
          <table:table-cell table:style-name="表格57.A1" office:value-type="string">
            <text:p text:style-name="P11">⭐ Kruskal 三句口訣</text:p>
            <text:p text:style-name="P92">① 所有邊排序（小→大），Union-Find 逐一判斷是否成環。</text:p>
            <text:p text:style-name="P92">② 同集合 → 跳過；不同集合 → 加入、合併。</text:p>
            <text:p text:style-name="P93">③ 時間複雜度 O(E log E)，稀疏圖（邊少）時效率最好。</text:p>
          </table:table-cell>
        </table:table-row>
      </table:table>
      <text:p text:style-name="P6"/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11">⭐ Sollin 三句口訣</text:p>
            <text:p text:style-name="P92">① 每個 Component 同時找自己最短外連邊，全體同時合併。</text:p>
            <text:p text:style-name="P92">② 每輪至少合併一半，最多 log V 輪結束。</text:p>
            <text:p text:style-name="P93">③ 適合平行 / 分散式計算，時間複雜度 O(E log V)。</text:p>
          </table:table-cell>
        </table:table-row>
      </table:table>
      <text:p text:style-name="P6"/>
      <table:table table:name="表格59" table:style-name="表格59">
        <table:table-column table:style-name="表格59.A"/>
        <table:table-row table:style-name="表格59.1">
          <table:table-cell table:style-name="表格59.A1" office:value-type="string">
            <text:p text:style-name="P11">⭐ MST 必背特性</text:p>
            <text:p text:style-name="P92">① V-1 條邊：少一條有孤立點；多一條必有迴路。</text:p>
            <text:p text:style-name="P92">② 無 Cycle：有環必有冗餘邊，去掉更輕。</text:p>
            <text:p text:style-name="P92">③ 連通圖才有 MST；不連通 → 最小擴張森林。</text:p>
            <text:p text:style-name="P93">④ Cut Property：任意把圖切成兩半，跨切割的最小邊必屬於某棵 MST；</text:p>
            <text:p text:style-name="P16">若該邊是跨越該 Cut 的唯一最小邊，則它必屬於所有 MST。</text:p>
          </table:table-cell>
        </table:table-row>
      </table:table>
      <text:p text:style-name="P6"/>
      <table:table table:name="表格60" table:style-name="表格60">
        <table:table-column table:style-name="表格60.A"/>
        <table:table-column table:style-name="表格60.B"/>
        <table:table-column table:style-name="表格60.C"/>
        <table:table-column table:style-name="表格60.D"/>
        <table:table-column table:style-name="表格60.E"/>
        <table:table-row table:style-name="表格60.1">
          <table:table-cell table:style-name="表格60.A1" office:value-type="string">
            <text:p text:style-name="P94">演算法</text:p>
          </table:table-cell>
          <table:table-cell table:style-name="表格60.A1" office:value-type="string">
            <text:p text:style-name="P94">出發點</text:p>
          </table:table-cell>
          <table:table-cell table:style-name="表格60.A1" office:value-type="string">
            <text:p text:style-name="P94">核心操作</text:p>
          </table:table-cell>
          <table:table-cell table:style-name="表格60.A1" office:value-type="string">
            <text:p text:style-name="P94">時間複雜度</text:p>
          </table:table-cell>
          <table:table-cell table:style-name="表格60.A1" office:value-type="string">
            <text:p text:style-name="P94">適合圖型</text:p>
          </table:table-cell>
        </table:table-row>
        <table:table-row table:style-name="表格60.1">
          <table:table-cell table:style-name="表格60.A2" office:value-type="string">
            <text:p text:style-name="P95">Prim</text:p>
          </table:table-cell>
          <table:table-cell table:style-name="表格60.A2" office:value-type="string">
            <text:p text:style-name="P95">任一節點</text:p>
          </table:table-cell>
          <table:table-cell table:style-name="表格60.A2" office:value-type="string">
            <text:p text:style-name="P95">T內→T外，選最小邊</text:p>
          </table:table-cell>
          <table:table-cell table:style-name="表格60.A2" office:value-type="string">
            <text:p text:style-name="P95">O(V²) / O(ElogV)</text:p>
          </table:table-cell>
          <table:table-cell table:style-name="表格60.A2" office:value-type="string">
            <text:p text:style-name="P95">稠密圖</text:p>
          </table:table-cell>
        </table:table-row>
        <table:table-row table:style-name="表格60.1">
          <table:table-cell table:style-name="表格60.A3" office:value-type="string">
            <text:p text:style-name="P95">Kruskal</text:p>
          </table:table-cell>
          <table:table-cell table:style-name="表格60.A3" office:value-type="string">
            <text:p text:style-name="P95">最小邊</text:p>
          </table:table-cell>
          <table:table-cell table:style-name="表格60.A3" office:value-type="string">
            <text:p text:style-name="P95">邊排序+Union-Find</text:p>
          </table:table-cell>
          <table:table-cell table:style-name="表格60.A3" office:value-type="string">
            <text:p text:style-name="P95">O(E log E)</text:p>
          </table:table-cell>
          <table:table-cell table:style-name="表格60.A3" office:value-type="string">
            <text:p text:style-name="P95">稀疏圖</text:p>
          </table:table-cell>
        </table:table-row>
        <table:table-row table:style-name="表格60.1">
          <table:table-cell table:style-name="表格60.A2" office:value-type="string">
            <text:p text:style-name="P95">Sollin</text:p>
          </table:table-cell>
          <table:table-cell table:style-name="表格60.A2" office:value-type="string">
            <text:p text:style-name="P95">所有節點同時</text:p>
          </table:table-cell>
          <table:table-cell table:style-name="表格60.A2" office:value-type="string">
            <text:p text:style-name="P95">各Component找最短外連邊</text:p>
          </table:table-cell>
          <table:table-cell table:style-name="表格60.A2" office:value-type="string">
            <text:p text:style-name="P95">O(E log V)</text:p>
          </table:table-cell>
          <table:table-cell table:style-name="表格60.A2" office:value-type="string">
            <text:p text:style-name="P95">平行/分散式</text:p>
          </table:table-cell>
        </table:table-row>
      </table:table>
      <text:p text:style-name="P6"/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11">113閩Q5 快速記憶</text:p>
            <text:p text:style-name="P96">跳過：(e,f)=4 → c,e,f 同集合 <text:s text:c="3"/>(c,d)=12 → c,d 已透過 a 相連</text:p>
            <text:p text:style-name="P97">MST：ce=2 + cf=3 + fg=6 + ac=9 + ad=10 + ab=13 = 43</text:p>
          </table:table-cell>
        </table:table-row>
      </table:table>
      <text:p text:style-name="P6"/>
      <text:p text:style-name="P6"/>
      <text:p text:style-name="P98">本筆記包含：名詞解釋 × 完整圖解 × 逐步推導 × Python程式實作 × 公職真題113閩Q5</text:p>
      <text:p text:style-name="P99">最小擴張樹 MST 完整考試筆記 <text:s/>v3.1（1-2章節改版）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529cm" fo:margin-bottom="0.353cm" style:contextual-spacing="false"/>
      <style:text-properties fo:color="#ffffff" loext:opacity="100%"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23cm" fo:margin-bottom="0.282cm" style:contextual-spacing="false"/>
      <style:text-properties fo:color="#ffffff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141cm" style:contextual-spacing="false" fo:padding-left="0cm" fo:padding-right="0cm" fo:padding-top="0cm" fo:padding-bottom="0.035cm" fo:border-left="none" fo:border-right="none" fo:border-top="none" fo:border-bottom="0.51pt solid #2e75b6">
        <style:tab-stops>
          <style:tab-stop style:position="13cm" style:type="right"/>
        </style:tab-stops>
      </style:paragraph-properties>
      <style:text-properties fo:color="#7f8c8d" loext:opacity="100%" style:font-name="Arial" fo:font-size="9pt" style:font-name-asian="Arial2" style:font-size-asian="9pt" style:font-name-complex="Arial2" style:font-size-complex="9pt"/>
    </style:style>
    <style:style style:name="MP2" style:family="paragraph" style:parent-style-name="Standard">
      <style:paragraph-properties fo:margin-top="0.141cm" fo:margin-bottom="0cm" style:contextual-spacing="false" fo:padding-left="0cm" fo:padding-right="0cm" fo:padding-top="0.035cm" fo:padding-bottom="0cm" fo:border-left="none" fo:border-right="none" fo:border-top="0.51pt solid #2e75b6" fo:border-bottom="none">
        <style:tab-stops>
          <style:tab-stop style:position="13cm" style:type="right"/>
        </style:tab-stops>
      </style:paragraph-properties>
    </style:style>
    <style:style style:name="MT1" style:family="text">
      <style:text-properties fo:color="#7f8c8d" loext:opacity="100%" style:font-name="Arial" fo:font-size="8pt" style:font-name-asian="Arial2" style:font-size-asian="8pt" style:font-name-complex="Arial2" style:font-size-complex="8pt"/>
    </style:style>
    <style:style style:name="MT2" style:family="text">
      <style:text-properties fo:color="#1f3864" loext:opacity="100%" style:font-name="Arial" fo:font-size="9pt" fo:font-style="normal" fo:font-weight="bold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.249cm" fo:margin-bottom="1.249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56cm" fo:margin-left="0cm" fo:margin-right="0cm" fo:margin-bottom="0.556cm" style:dynamic-spacing="true"/>
      </style:header-style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【第15章】最小擴張樹 MST<text:tab/>最小擴張樹完整考試筆記 v3.1</text:p>
      </style:header>
      <style:footer>
        <text:p text:style-name="MP2"><text:span text:style-name="MT1">MST 完整筆記 v3.1<text:tab/>第 </text:span><text:span text:style-name="MT2"><text:page-number text:select-page="current">22</text:page-number></text:span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29</meta:editing-cycles>
    <meta:creation-date>2026-06-06T08:37:28.179000000</meta:creation-date>
    <dc:date>2026-06-06T19:28:41.257395900</dc:date>
    <meta:generator>LibreOffice/26.2.3.2$Windows_X86_64 LibreOffice_project/70e089b17412e4cb7773e41413306b17a2328c34</meta:generator>
    <meta:editing-duration>PT2H3M55S</meta:editing-duration>
    <meta:document-statistic meta:table-count="81" meta:image-count="1" meta:object-count="0" meta:page-count="22" meta:paragraph-count="815" meta:word-count="9164" meta:character-count="20489" meta:non-whitespace-character-count="15401"/>
  </office:meta>
</office:document-meta>
</file>