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24000001F643D3A160.png" manifest:media-type="image/png"/>
  <manifest:file-entry manifest:full-path="Pictures/1000000000000550000003C07CAFE178.png" manifest:media-type="image/png"/>
  <manifest:file-entry manifest:full-path="Pictures/1000000000000550000003D4E548CBA8.png" manifest:media-type="image/png"/>
  <manifest:file-entry manifest:full-path="Pictures/1000000000000550000003D4BE568724.png" manifest:media-type="image/png"/>
  <manifest:file-entry manifest:full-path="Pictures/1000000000000550000002F8B3BF8B36.png" manifest:media-type="image/png"/>
  <manifest:file-entry manifest:full-path="Pictures/1000000000000550000003FCD632297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228cm" fo:margin-left="0cm" fo:margin-top="0cm" fo:margin-bottom="0cm" table:align="left" style:writing-mode="page"/>
    </style:style>
    <style:style style:name="表格1.A" style:family="table-column">
      <style:table-column-properties style:column-width="16.22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="0.706cm" fo:border="none">
        <style:background-image/>
      </style:table-cell-properties>
    </style:style>
    <style:style style:name="表格2" style:family="table">
      <style:table-properties style:width="16.228cm" fo:margin-left="0.009cm" fo:margin-top="0cm" fo:margin-bottom="0cm" table:align="left" style:writing-mode="page"/>
    </style:style>
    <style:style style:name="表格2.A" style:family="table-column">
      <style:table-column-properties style:column-width="16.228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" style:family="table">
      <style:table-properties style:width="16.228cm" fo:margin-left="0.009cm" fo:margin-top="0cm" fo:margin-bottom="0cm" table:align="left" style:writing-mode="page"/>
    </style:style>
    <style:style style:name="表格3.A" style:family="table-column">
      <style:table-column-properties style:column-width="16.228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" style:family="table">
      <style:table-properties style:width="16.228cm" fo:margin-left="0.009cm" fo:margin-top="0cm" fo:margin-bottom="0cm" table:align="left" style:writing-mode="page"/>
    </style:style>
    <style:style style:name="表格4.A" style:family="table-column">
      <style:table-column-properties style:column-width="16.2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5" style:family="table">
      <style:table-properties style:width="16.228cm" fo:margin-left="0.009cm" fo:margin-top="0cm" fo:margin-bottom="0cm" table:align="left" style:writing-mode="page"/>
    </style:style>
    <style:style style:name="表格5.A" style:family="table-column">
      <style:table-column-properties style:column-width="8.043cm"/>
    </style:style>
    <style:style style:name="表格5.B" style:family="table-column">
      <style:table-column-properties style:column-width="8.184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5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6" style:family="table">
      <style:table-properties style:width="16.228cm" fo:margin-left="0.009cm" fo:margin-top="0cm" fo:margin-bottom="0cm" table:align="left" style:writing-mode="page"/>
    </style:style>
    <style:style style:name="表格6.A" style:family="table-column">
      <style:table-column-properties style:column-width="8.043cm"/>
    </style:style>
    <style:style style:name="表格6.B" style:family="table-column">
      <style:table-column-properties style:column-width="8.184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6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7" style:family="table">
      <style:table-properties style:width="16.228cm" fo:margin-left="0.009cm" fo:margin-top="0cm" fo:margin-bottom="0cm" table:align="left" style:writing-mode="page"/>
    </style:style>
    <style:style style:name="表格7.A" style:family="table-column">
      <style:table-column-properties style:column-width="16.22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8" style:family="table">
      <style:table-properties style:width="16.228cm" fo:margin-left="0.009cm" fo:margin-top="0cm" fo:margin-bottom="0cm" table:align="left" style:writing-mode="page"/>
    </style:style>
    <style:style style:name="表格8.A" style:family="table-column">
      <style:table-column-properties style:column-width="16.228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9" style:family="table">
      <style:table-properties style:width="16.228cm" fo:margin-left="0.009cm" fo:margin-top="0cm" fo:margin-bottom="0cm" table:align="left" style:writing-mode="page"/>
    </style:style>
    <style:style style:name="表格9.A" style:family="table-column">
      <style:table-column-properties style:column-width="8.043cm"/>
    </style:style>
    <style:style style:name="表格9.B" style:family="table-column">
      <style:table-column-properties style:column-width="8.184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10" style:family="table">
      <style:table-properties style:width="16.228cm" fo:margin-left="0.009cm" fo:margin-top="0cm" fo:margin-bottom="0cm" table:align="left" style:writing-mode="page"/>
    </style:style>
    <style:style style:name="表格10.A" style:family="table-column">
      <style:table-column-properties style:column-width="16.228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11" style:family="table">
      <style:table-properties style:width="16.228cm" fo:margin-left="0.009cm" fo:margin-top="0cm" fo:margin-bottom="0cm" table:align="left" style:writing-mode="page"/>
    </style:style>
    <style:style style:name="表格11.A" style:family="table-column">
      <style:table-column-properties style:column-width="16.228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2" style:family="table">
      <style:table-properties style:width="16.228cm" fo:margin-left="0.009cm" fo:margin-top="0cm" fo:margin-bottom="0cm" table:align="left" style:writing-mode="page"/>
    </style:style>
    <style:style style:name="表格12.A" style:family="table-column">
      <style:table-column-properties style:column-width="16.228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13" style:family="table">
      <style:table-properties style:width="16.228cm" fo:margin-left="0.009cm" fo:margin-top="0cm" fo:margin-bottom="0cm" table:align="left" style:writing-mode="page"/>
    </style:style>
    <style:style style:name="表格13.A" style:family="table-column">
      <style:table-column-properties style:column-width="16.228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14" style:family="table">
      <style:table-properties style:width="16.228cm" fo:margin-left="0.009cm" fo:margin-top="0cm" fo:margin-bottom="0cm" table:align="left" style:writing-mode="page"/>
    </style:style>
    <style:style style:name="表格14.A" style:family="table-column">
      <style:table-column-properties style:column-width="3.246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176cm" fo:padding-right="0.176cm" fo:padding-top="0.141cm" fo:padding-bottom="0.141cm" fo:border="0.5pt solid #1f3864">
        <style:background-image/>
      </style:table-cell-properties>
    </style:style>
    <style:style style:name="表格1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1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15" style:family="table">
      <style:table-properties style:width="16.228cm" fo:margin-left="0.009cm" fo:margin-top="0cm" fo:margin-bottom="0cm" table:align="left" style:writing-mode="page"/>
    </style:style>
    <style:style style:name="表格15.A" style:family="table-column">
      <style:table-column-properties style:column-width="16.228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6" style:family="table">
      <style:table-properties style:width="16.228cm" fo:margin-left="0.009cm" fo:margin-top="0cm" fo:margin-bottom="0cm" table:align="left" style:writing-mode="page"/>
    </style:style>
    <style:style style:name="表格16.A" style:family="table-column">
      <style:table-column-properties style:column-width="16.228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7" style:family="table">
      <style:table-properties style:width="16.228cm" fo:margin-left="0.009cm" fo:margin-top="0cm" fo:margin-bottom="0cm" table:align="left" style:writing-mode="page"/>
    </style:style>
    <style:style style:name="表格17.A" style:family="table-column">
      <style:table-column-properties style:column-width="16.228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9" style:family="table">
      <style:table-properties style:width="16.228cm" fo:margin-left="0.009cm" fo:margin-top="0cm" fo:margin-bottom="0cm" table:align="left" style:writing-mode="page"/>
    </style:style>
    <style:style style:name="表格19.A" style:family="table-column">
      <style:table-column-properties style:column-width="16.228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0" style:family="table">
      <style:table-properties style:width="16.228cm" fo:margin-left="0.009cm" fo:margin-top="0cm" fo:margin-bottom="0cm" table:align="left" style:writing-mode="page"/>
    </style:style>
    <style:style style:name="表格20.A" style:family="table-column">
      <style:table-column-properties style:column-width="16.228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1" style:family="table">
      <style:table-properties style:width="16.228cm" fo:margin-left="0.009cm" fo:margin-top="0cm" fo:margin-bottom="0cm" table:align="left" style:writing-mode="page"/>
    </style:style>
    <style:style style:name="表格21.A" style:family="table-column">
      <style:table-column-properties style:column-width="16.228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2" style:family="table">
      <style:table-properties style:width="16.228cm" fo:margin-left="0.009cm" fo:margin-top="0cm" fo:margin-bottom="0cm" table:align="left" style:writing-mode="page"/>
    </style:style>
    <style:style style:name="表格22.A" style:family="table-column">
      <style:table-column-properties style:column-width="16.228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3" style:family="table">
      <style:table-properties style:width="16.228cm" fo:margin-left="0.009cm" fo:margin-top="0cm" fo:margin-bottom="0cm" table:align="left" style:writing-mode="page"/>
    </style:style>
    <style:style style:name="表格23.A" style:family="table-column">
      <style:table-column-properties style:column-width="16.228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新增說明框" style:family="table">
      <style:table-properties style:width="16.228cm" fo:margin-left="0.009cm" fo:margin-top="0cm" fo:margin-bottom="0cm" table:align="left" style:writing-mode="page"/>
    </style:style>
    <style:style style:name="新增說明框.A" style:family="table-column">
      <style:table-column-properties style:column-width="16.228cm"/>
    </style:style>
    <style:style style:name="新增說明框.1" style:family="table-row">
      <style:table-row-properties fo:keep-together="auto"/>
    </style:style>
    <style:style style:name="新增說明框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說明框_5f_1" style:display-name="新增說明框_1" style:family="table">
      <style:table-properties style:width="16.228cm" fo:margin-left="0.009cm" fo:margin-top="0cm" fo:margin-bottom="0cm" table:align="left" style:writing-mode="page"/>
    </style:style>
    <style:style style:name="新增說明框_5f_1.A" style:display-name="新增說明框_1.A" style:family="table-column">
      <style:table-column-properties style:column-width="16.228cm"/>
    </style:style>
    <style:style style:name="新增說明框_5f_1.1" style:display-name="新增說明框_1.1" style:family="table-row">
      <style:table-row-properties fo:keep-together="auto"/>
    </style:style>
    <style:style style:name="新增說明框_5f_1.A1" style:display-name="新增說明框_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24" style:family="table">
      <style:table-properties style:width="16.228cm" fo:margin-left="0.009cm" fo:margin-top="0cm" fo:margin-bottom="0cm" table:align="left" style:writing-mode="page"/>
    </style:style>
    <style:style style:name="表格24.A" style:family="table-column">
      <style:table-column-properties style:column-width="16.228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25" style:family="table">
      <style:table-properties style:width="16.228cm" fo:margin-left="0.009cm" fo:margin-top="0cm" fo:margin-bottom="0cm" table:align="left" style:writing-mode="page"/>
    </style:style>
    <style:style style:name="表格25.A" style:family="table-column">
      <style:table-column-properties style:column-width="2.82cm"/>
    </style:style>
    <style:style style:name="表格25.B" style:family="table-column">
      <style:table-column-properties style:column-width="3.881cm"/>
    </style:style>
    <style:style style:name="表格25.C" style:family="table-column">
      <style:table-column-properties style:column-width="3.528cm"/>
    </style:style>
    <style:style style:name="表格25.D" style:family="table-column">
      <style:table-column-properties style:column-width="5.999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25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25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62" style:family="table">
      <style:table-properties style:width="16.228cm" fo:margin-left="0.009cm" fo:margin-top="0cm" fo:margin-bottom="0cm" table:align="left" style:writing-mode="page"/>
    </style:style>
    <style:style style:name="新增表格62.A" style:family="table-column">
      <style:table-column-properties style:column-width="16.228cm"/>
    </style:style>
    <style:style style:name="新增表格62.1" style:family="table-row">
      <style:table-row-properties fo:keep-together="auto"/>
    </style:style>
    <style:style style:name="新增表格6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3" style:family="table">
      <style:table-properties style:width="16.228cm" fo:margin-left="0.009cm" fo:margin-top="0cm" fo:margin-bottom="0cm" table:align="left" style:writing-mode="page"/>
    </style:style>
    <style:style style:name="新增表格63.A" style:family="table-column">
      <style:table-column-properties style:column-width="16.228cm"/>
    </style:style>
    <style:style style:name="新增表格63.1" style:family="table-row">
      <style:table-row-properties style:min-row-height="8.054cm" fo:keep-together="auto"/>
    </style:style>
    <style:style style:name="新增表格6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64" style:family="table">
      <style:table-properties style:width="16.228cm" fo:margin-left="0.009cm" fo:margin-top="0cm" fo:margin-bottom="0cm" table:align="left" style:writing-mode="page"/>
    </style:style>
    <style:style style:name="新增表格64.A" style:family="table-column">
      <style:table-column-properties style:column-width="2.82cm"/>
    </style:style>
    <style:style style:name="新增表格64.B" style:family="table-column">
      <style:table-column-properties style:column-width="3.881cm"/>
    </style:style>
    <style:style style:name="新增表格64.C" style:family="table-column">
      <style:table-column-properties style:column-width="3.528cm"/>
    </style:style>
    <style:style style:name="新增表格64.D" style:family="table-column">
      <style:table-column-properties style:column-width="5.999cm"/>
    </style:style>
    <style:style style:name="新增表格64.1" style:family="table-row">
      <style:table-row-properties fo:keep-together="auto"/>
    </style:style>
    <style:style style:name="新增表格64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6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6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64.A4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65" style:family="table">
      <style:table-properties style:width="16.228cm" fo:margin-left="0.009cm" fo:margin-top="0cm" fo:margin-bottom="0cm" table:align="left" style:writing-mode="page"/>
    </style:style>
    <style:style style:name="新增表格65.A" style:family="table-column">
      <style:table-column-properties style:column-width="16.228cm"/>
    </style:style>
    <style:style style:name="新增表格65.1" style:family="table-row">
      <style:table-row-properties fo:keep-together="auto"/>
    </style:style>
    <style:style style:name="新增表格6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6" style:family="table">
      <style:table-properties style:width="16.228cm" fo:margin-left="0.009cm" fo:margin-top="0cm" fo:margin-bottom="0cm" table:align="left" style:writing-mode="page"/>
    </style:style>
    <style:style style:name="新增表格66.A" style:family="table-column">
      <style:table-column-properties style:column-width="2.82cm"/>
    </style:style>
    <style:style style:name="新增表格66.B" style:family="table-column">
      <style:table-column-properties style:column-width="3.881cm"/>
    </style:style>
    <style:style style:name="新增表格66.C" style:family="table-column">
      <style:table-column-properties style:column-width="3.528cm"/>
    </style:style>
    <style:style style:name="新增表格66.D" style:family="table-column">
      <style:table-column-properties style:column-width="5.999cm"/>
    </style:style>
    <style:style style:name="新增表格66.1" style:family="table-row">
      <style:table-row-properties fo:keep-together="auto"/>
    </style:style>
    <style:style style:name="新增表格66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66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66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HeapSummary" style:family="table">
      <style:table-properties style:width="16.228cm" fo:margin-left="0.009cm" fo:margin-top="0cm" fo:margin-bottom="0cm" table:align="left" style:writing-mode="page"/>
    </style:style>
    <style:style style:name="新增HeapSummary.A" style:family="table-column">
      <style:table-column-properties style:column-width="16.228cm"/>
    </style:style>
    <style:style style:name="新增HeapSummary.1" style:family="table-row">
      <style:table-row-properties fo:keep-together="auto"/>
    </style:style>
    <style:style style:name="新增HeapSummary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67" style:family="table">
      <style:table-properties style:width="16.228cm" fo:margin-left="0.009cm" fo:margin-top="0cm" fo:margin-bottom="0cm" table:align="left" style:writing-mode="page"/>
    </style:style>
    <style:style style:name="新增表格67.A" style:family="table-column">
      <style:table-column-properties style:column-width="16.228cm"/>
    </style:style>
    <style:style style:name="新增表格67.1" style:family="table-row">
      <style:table-row-properties fo:keep-together="auto"/>
    </style:style>
    <style:style style:name="新增表格67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6" style:family="table">
      <style:table-properties style:width="16.228cm" fo:margin-left="0.009cm" fo:margin-top="0cm" fo:margin-bottom="0cm" table:align="left" style:writing-mode="page"/>
    </style:style>
    <style:style style:name="表格26.A" style:family="table-column">
      <style:table-column-properties style:column-width="16.228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7" style:family="table">
      <style:table-properties style:width="16.228cm" fo:margin-left="0.009cm" fo:margin-top="0cm" fo:margin-bottom="0cm" table:align="left" style:writing-mode="page"/>
    </style:style>
    <style:style style:name="表格27.A" style:family="table-column">
      <style:table-column-properties style:column-width="16.228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8" style:family="table">
      <style:table-properties style:width="16.228cm" fo:margin-left="0.009cm" fo:margin-top="0cm" fo:margin-bottom="0cm" table:align="left" style:writing-mode="page"/>
    </style:style>
    <style:style style:name="表格28.A" style:family="table-column">
      <style:table-column-properties style:column-width="16.228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9" style:family="table">
      <style:table-properties style:width="16.228cm" fo:margin-left="0.009cm" fo:margin-top="0cm" fo:margin-bottom="0cm" table:align="left" style:writing-mode="page"/>
    </style:style>
    <style:style style:name="表格29.A" style:family="table-column">
      <style:table-column-properties style:column-width="16.228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0" style:family="table">
      <style:table-properties style:width="16.228cm" fo:margin-left="0.009cm" fo:margin-top="0cm" fo:margin-bottom="0cm" table:align="left" style:writing-mode="page"/>
    </style:style>
    <style:style style:name="表格30.A" style:family="table-column">
      <style:table-column-properties style:column-width="16.228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1" style:family="table">
      <style:table-properties style:width="16.228cm" fo:margin-left="0.009cm" fo:margin-top="0cm" fo:margin-bottom="0cm" table:align="left" style:writing-mode="page"/>
    </style:style>
    <style:style style:name="表格31.A" style:family="table-column">
      <style:table-column-properties style:column-width="16.2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2" style:family="table">
      <style:table-properties style:width="16.228cm" fo:margin-left="0.009cm" fo:margin-top="0cm" fo:margin-bottom="0cm" table:align="left" style:writing-mode="page"/>
    </style:style>
    <style:style style:name="表格32.A" style:family="table-column">
      <style:table-column-properties style:column-width="16.228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33" style:family="table">
      <style:table-properties style:width="16.228cm" fo:margin-left="0.009cm" fo:margin-top="0cm" fo:margin-bottom="0cm" table:align="left" style:writing-mode="page"/>
    </style:style>
    <style:style style:name="表格33.A" style:family="table-column">
      <style:table-column-properties style:column-width="16.228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34" style:family="table">
      <style:table-properties style:width="16.228cm" fo:margin-left="0.009cm" fo:margin-top="0cm" fo:margin-bottom="0cm" table:align="left" style:writing-mode="page"/>
    </style:style>
    <style:style style:name="表格34.A" style:family="table-column">
      <style:table-column-properties style:column-width="16.228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5" style:family="table">
      <style:table-properties style:width="16.228cm" fo:margin-left="0.009cm" fo:margin-top="0cm" fo:margin-bottom="0cm" table:align="left" style:writing-mode="page"/>
    </style:style>
    <style:style style:name="表格35.A" style:family="table-column">
      <style:table-column-properties style:column-width="16.228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6" style:family="table">
      <style:table-properties style:width="16.228cm" fo:margin-left="0.009cm" fo:margin-top="0cm" fo:margin-bottom="0cm" table:align="left" style:writing-mode="page"/>
    </style:style>
    <style:style style:name="表格36.A" style:family="table-column">
      <style:table-column-properties style:column-width="16.228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新增表格68" style:family="table">
      <style:table-properties style:width="16.228cm" fo:margin-left="0.009cm" fo:margin-top="0cm" fo:margin-bottom="0cm" table:align="left" style:writing-mode="page"/>
    </style:style>
    <style:style style:name="新增表格68.A" style:family="table-column">
      <style:table-column-properties style:column-width="16.228cm"/>
    </style:style>
    <style:style style:name="新增表格68.1" style:family="table-row">
      <style:table-row-properties fo:keep-together="auto"/>
    </style:style>
    <style:style style:name="新增表格6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9" style:family="table">
      <style:table-properties style:width="16.228cm" fo:margin-left="0.009cm" fo:margin-top="0cm" fo:margin-bottom="0cm" table:align="left" style:writing-mode="page"/>
    </style:style>
    <style:style style:name="新增表格69.A" style:family="table-column">
      <style:table-column-properties style:column-width="16.228cm"/>
    </style:style>
    <style:style style:name="新增表格69.1" style:family="table-row">
      <style:table-row-properties fo:keep-together="auto"/>
    </style:style>
    <style:style style:name="新增表格69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0" style:family="table">
      <style:table-properties style:width="16.228cm" fo:margin-left="0.009cm" fo:margin-top="0cm" fo:margin-bottom="0cm" table:align="left" style:writing-mode="page"/>
    </style:style>
    <style:style style:name="新增表格70.A" style:family="table-column">
      <style:table-column-properties style:column-width="16.228cm"/>
    </style:style>
    <style:style style:name="新增表格70.1" style:family="table-row">
      <style:table-row-properties fo:keep-together="auto"/>
    </style:style>
    <style:style style:name="新增表格7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1" style:family="table">
      <style:table-properties style:width="16.228cm" fo:margin-left="0.009cm" fo:margin-top="0cm" fo:margin-bottom="0cm" table:align="left" style:writing-mode="page"/>
    </style:style>
    <style:style style:name="新增表格71.A" style:family="table-column">
      <style:table-column-properties style:column-width="16.228cm"/>
    </style:style>
    <style:style style:name="新增表格71.1" style:family="table-row">
      <style:table-row-properties fo:keep-together="auto"/>
    </style:style>
    <style:style style:name="新增表格7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2" style:family="table">
      <style:table-properties style:width="16.228cm" fo:margin-left="0.009cm" fo:margin-top="0cm" fo:margin-bottom="0cm" table:align="left" style:writing-mode="page"/>
    </style:style>
    <style:style style:name="新增表格72.A" style:family="table-column">
      <style:table-column-properties style:column-width="2.82cm"/>
    </style:style>
    <style:style style:name="新增表格72.B" style:family="table-column">
      <style:table-column-properties style:column-width="3.881cm"/>
    </style:style>
    <style:style style:name="新增表格72.C" style:family="table-column">
      <style:table-column-properties style:column-width="3.528cm"/>
    </style:style>
    <style:style style:name="新增表格72.D" style:family="table-column">
      <style:table-column-properties style:column-width="5.999cm"/>
    </style:style>
    <style:style style:name="新增表格72.1" style:family="table-row">
      <style:table-row-properties fo:keep-together="auto"/>
    </style:style>
    <style:style style:name="新增表格72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72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72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72.A5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73" style:family="table">
      <style:table-properties style:width="16.228cm" fo:margin-left="0.009cm" fo:margin-top="0cm" fo:margin-bottom="0cm" table:align="left" style:writing-mode="page"/>
    </style:style>
    <style:style style:name="新增表格73.A" style:family="table-column">
      <style:table-column-properties style:column-width="16.228cm"/>
    </style:style>
    <style:style style:name="新增表格73.1" style:family="table-row">
      <style:table-row-properties fo:keep-together="auto"/>
    </style:style>
    <style:style style:name="新增表格73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新增表格74" style:family="table">
      <style:table-properties style:width="16.228cm" fo:margin-left="0.009cm" fo:margin-top="0cm" fo:margin-bottom="0cm" table:align="left" style:writing-mode="page"/>
    </style:style>
    <style:style style:name="新增表格74.A" style:family="table-column">
      <style:table-column-properties style:column-width="16.228cm"/>
    </style:style>
    <style:style style:name="新增表格74.1" style:family="table-row">
      <style:table-row-properties fo:keep-together="auto"/>
    </style:style>
    <style:style style:name="新增表格74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5" style:family="table">
      <style:table-properties style:width="16.228cm" fo:margin-left="0.009cm" fo:margin-top="0cm" fo:margin-bottom="0cm" table:align="left" style:writing-mode="page"/>
    </style:style>
    <style:style style:name="新增表格75.A" style:family="table-column">
      <style:table-column-properties style:column-width="16.228cm"/>
    </style:style>
    <style:style style:name="新增表格75.1" style:family="table-row">
      <style:table-row-properties fo:keep-together="auto"/>
    </style:style>
    <style:style style:name="新增表格7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7" style:family="table">
      <style:table-properties style:width="16.228cm" fo:margin-left="0.009cm" fo:margin-top="0cm" fo:margin-bottom="0cm" table:align="left" style:writing-mode="page"/>
    </style:style>
    <style:style style:name="表格37.A" style:family="table-column">
      <style:table-column-properties style:column-width="16.228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8" style:family="table">
      <style:table-properties style:width="16.228cm" fo:margin-left="0.009cm" fo:margin-top="0cm" fo:margin-bottom="0cm" table:align="left" style:writing-mode="page"/>
    </style:style>
    <style:style style:name="表格38.A" style:family="table-column">
      <style:table-column-properties style:column-width="16.228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39" style:family="table">
      <style:table-properties style:width="16.228cm" fo:margin-left="0.009cm" fo:margin-top="0cm" fo:margin-bottom="0cm" table:align="left" style:writing-mode="page"/>
    </style:style>
    <style:style style:name="表格39.A" style:family="table-column">
      <style:table-column-properties style:column-width="16.228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0" style:family="table">
      <style:table-properties style:width="16.228cm" fo:margin-left="0.009cm" fo:margin-top="0cm" fo:margin-bottom="0cm" table:align="left" style:writing-mode="page"/>
    </style:style>
    <style:style style:name="表格40.A" style:family="table-column">
      <style:table-column-properties style:column-width="16.228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41" style:family="table">
      <style:table-properties style:width="16.228cm" fo:margin-left="0.009cm" fo:margin-top="0cm" fo:margin-bottom="0cm" table:align="left" style:writing-mode="page"/>
    </style:style>
    <style:style style:name="表格41.A" style:family="table-column">
      <style:table-column-properties style:column-width="16.228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2" style:family="table">
      <style:table-properties style:width="16.228cm" fo:margin-left="0.009cm" fo:margin-top="0cm" fo:margin-bottom="0cm" table:align="left" style:writing-mode="page"/>
    </style:style>
    <style:style style:name="表格42.A" style:family="table-column">
      <style:table-column-properties style:column-width="16.228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43" style:family="table">
      <style:table-properties style:width="16.228cm" fo:margin-left="0.009cm" fo:margin-top="0cm" fo:margin-bottom="0cm" table:align="left" style:writing-mode="page"/>
    </style:style>
    <style:style style:name="表格43.A" style:family="table-column">
      <style:table-column-properties style:column-width="16.228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新增表格76" style:family="table">
      <style:table-properties style:width="16.228cm" fo:margin-left="0.009cm" fo:margin-top="0cm" fo:margin-bottom="0cm" table:align="left" style:writing-mode="page"/>
    </style:style>
    <style:style style:name="新增表格76.A" style:family="table-column">
      <style:table-column-properties style:column-width="16.228cm"/>
    </style:style>
    <style:style style:name="新增表格76.1" style:family="table-row">
      <style:table-row-properties fo:keep-together="auto"/>
    </style:style>
    <style:style style:name="新增表格7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7" style:family="table">
      <style:table-properties style:width="16.228cm" fo:margin-left="0.009cm" fo:margin-top="0cm" fo:margin-bottom="0cm" table:align="left" style:writing-mode="page"/>
    </style:style>
    <style:style style:name="新增表格77.A" style:family="table-column">
      <style:table-column-properties style:column-width="16.228cm"/>
    </style:style>
    <style:style style:name="新增表格77.1" style:family="table-row">
      <style:table-row-properties fo:keep-together="auto"/>
    </style:style>
    <style:style style:name="新增表格7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8" style:family="table">
      <style:table-properties style:width="16.228cm" fo:margin-left="0.009cm" fo:margin-top="0cm" fo:margin-bottom="0cm" table:align="left" style:writing-mode="page"/>
    </style:style>
    <style:style style:name="新增表格78.A" style:family="table-column">
      <style:table-column-properties style:column-width="2.82cm"/>
    </style:style>
    <style:style style:name="新增表格78.B" style:family="table-column">
      <style:table-column-properties style:column-width="3.881cm"/>
    </style:style>
    <style:style style:name="新增表格78.C" style:family="table-column">
      <style:table-column-properties style:column-width="3.528cm"/>
    </style:style>
    <style:style style:name="新增表格78.D" style:family="table-column">
      <style:table-column-properties style:column-width="5.999cm"/>
    </style:style>
    <style:style style:name="新增表格78.1" style:family="table-row">
      <style:table-row-properties fo:keep-together="auto"/>
    </style:style>
    <style:style style:name="新增表格78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78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78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78.A6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79" style:family="table">
      <style:table-properties style:width="16.228cm" fo:margin-left="0.009cm" fo:margin-top="0cm" fo:margin-bottom="0cm" table:align="left" style:writing-mode="page"/>
    </style:style>
    <style:style style:name="新增表格79.A" style:family="table-column">
      <style:table-column-properties style:column-width="16.228cm"/>
    </style:style>
    <style:style style:name="新增表格79.1" style:family="table-row">
      <style:table-row-properties fo:keep-together="auto"/>
    </style:style>
    <style:style style:name="新增表格79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80" style:family="table">
      <style:table-properties style:width="16.228cm" fo:margin-left="0.009cm" fo:margin-top="0cm" fo:margin-bottom="0cm" table:align="left" style:writing-mode="page"/>
    </style:style>
    <style:style style:name="新增表格80.A" style:family="table-column">
      <style:table-column-properties style:column-width="16.228cm"/>
    </style:style>
    <style:style style:name="新增表格80.1" style:family="table-row">
      <style:table-row-properties fo:keep-together="auto"/>
    </style:style>
    <style:style style:name="新增表格80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新增表格81" style:family="table">
      <style:table-properties style:width="16.228cm" fo:margin-left="0.009cm" fo:margin-top="0cm" fo:margin-bottom="0cm" table:align="left" style:writing-mode="page"/>
    </style:style>
    <style:style style:name="新增表格81.A" style:family="table-column">
      <style:table-column-properties style:column-width="16.228cm"/>
    </style:style>
    <style:style style:name="新增表格81.1" style:family="table-row">
      <style:table-row-properties fo:keep-together="auto"/>
    </style:style>
    <style:style style:name="新增表格8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82" style:family="table">
      <style:table-properties style:width="16.228cm" fo:margin-left="0.009cm" fo:margin-top="0cm" fo:margin-bottom="0cm" table:align="left" style:writing-mode="page"/>
    </style:style>
    <style:style style:name="新增表格82.A" style:family="table-column">
      <style:table-column-properties style:column-width="16.228cm"/>
    </style:style>
    <style:style style:name="新增表格82.1" style:family="table-row">
      <style:table-row-properties fo:keep-together="auto"/>
    </style:style>
    <style:style style:name="新增表格82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44" style:family="table">
      <style:table-properties style:width="16.228cm" fo:margin-left="0.009cm" fo:margin-top="0cm" fo:margin-bottom="0cm" table:align="left" style:writing-mode="page"/>
    </style:style>
    <style:style style:name="表格44.A" style:family="table-column">
      <style:table-column-properties style:column-width="16.228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45" style:family="table">
      <style:table-properties style:width="16.228cm" fo:margin-left="0.009cm" fo:margin-top="0cm" fo:margin-bottom="0cm" table:align="left" style:writing-mode="page"/>
    </style:style>
    <style:style style:name="表格45.A" style:family="table-column">
      <style:table-column-properties style:column-width="16.228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6" style:family="table">
      <style:table-properties style:width="16.228cm" fo:margin-left="0.009cm" fo:margin-top="0cm" fo:margin-bottom="0cm" table:align="left" style:writing-mode="page"/>
    </style:style>
    <style:style style:name="表格46.A" style:family="table-column">
      <style:table-column-properties style:column-width="16.22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7" style:family="table">
      <style:table-properties style:width="16.228cm" fo:margin-left="0.009cm" fo:margin-top="0cm" fo:margin-bottom="0cm" table:align="left" style:writing-mode="page"/>
    </style:style>
    <style:style style:name="表格47.A" style:family="table-column">
      <style:table-column-properties style:column-width="16.228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8" style:family="table">
      <style:table-properties style:width="16.228cm" fo:margin-left="0.009cm" fo:margin-top="0cm" fo:margin-bottom="0cm" table:align="left" style:writing-mode="page"/>
    </style:style>
    <style:style style:name="表格48.A" style:family="table-column">
      <style:table-column-properties style:column-width="16.228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9" style:family="table">
      <style:table-properties style:width="16.228cm" fo:margin-left="0.009cm" fo:margin-top="0cm" fo:margin-bottom="0cm" table:align="left" style:writing-mode="page"/>
    </style:style>
    <style:style style:name="表格49.A" style:family="table-column">
      <style:table-column-properties style:column-width="16.228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50" style:family="table">
      <style:table-properties style:width="16.228cm" fo:margin-left="0.009cm" fo:margin-top="0cm" fo:margin-bottom="0cm" table:align="left" style:writing-mode="page"/>
    </style:style>
    <style:style style:name="表格50.A" style:family="table-column">
      <style:table-column-properties style:column-width="16.228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1" style:family="table">
      <style:table-properties style:width="16.228cm" fo:margin-left="0.009cm" fo:margin-top="0cm" fo:margin-bottom="0cm" table:align="left" style:writing-mode="page"/>
    </style:style>
    <style:style style:name="表格51.A" style:family="table-column">
      <style:table-column-properties style:column-width="16.228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2" style:family="table">
      <style:table-properties style:width="16.228cm" fo:margin-left="0.009cm" fo:margin-top="0cm" fo:margin-bottom="0cm" table:align="left" style:writing-mode="page"/>
    </style:style>
    <style:style style:name="表格52.A" style:family="table-column">
      <style:table-column-properties style:column-width="16.228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3" style:family="table">
      <style:table-properties style:width="16.228cm" fo:margin-left="0.009cm" fo:margin-top="0cm" fo:margin-bottom="0cm" table:align="left" style:writing-mode="page"/>
    </style:style>
    <style:style style:name="表格53.A" style:family="table-column">
      <style:table-column-properties style:column-width="16.228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54" style:family="table">
      <style:table-properties style:width="16.228cm" fo:margin-left="0.009cm" fo:margin-top="0cm" fo:margin-bottom="0cm" table:align="left" style:writing-mode="page"/>
    </style:style>
    <style:style style:name="表格54.A" style:family="table-column">
      <style:table-column-properties style:column-width="16.228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5" style:family="table">
      <style:table-properties style:width="16.228cm" fo:margin-left="0.009cm" fo:margin-top="0cm" fo:margin-bottom="0cm" table:align="left" style:writing-mode="page"/>
    </style:style>
    <style:style style:name="表格55.A" style:family="table-column">
      <style:table-column-properties style:column-width="16.228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56" style:family="table">
      <style:table-properties style:width="16.228cm" fo:margin-left="0.009cm" fo:margin-top="0cm" fo:margin-bottom="0cm" table:align="left" style:writing-mode="page"/>
    </style:style>
    <style:style style:name="表格56.A" style:family="table-column">
      <style:table-column-properties style:column-width="16.228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7" style:family="table">
      <style:table-properties style:width="16.228cm" fo:margin-left="0.009cm" fo:margin-top="0cm" fo:margin-bottom="0cm" table:align="left" style:writing-mode="page"/>
    </style:style>
    <style:style style:name="表格57.A" style:family="table-column">
      <style:table-column-properties style:column-width="16.228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58" style:family="table">
      <style:table-properties style:width="16.228cm" fo:margin-left="0.009cm" fo:margin-top="0cm" fo:margin-bottom="0cm" table:align="left" style:writing-mode="page"/>
    </style:style>
    <style:style style:name="表格58.A" style:family="table-column">
      <style:table-column-properties style:column-width="16.228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e8daef" fo:padding-left="0.353cm" fo:padding-right="0.353cm" fo:padding-top="0.212cm" fo:padding-bottom="0.212cm" fo:border="0.5pt solid #8e44ad">
        <style:background-image/>
      </style:table-cell-properties>
    </style:style>
    <style:style style:name="表格59" style:family="table">
      <style:table-properties style:width="16.228cm" fo:margin-left="0.009cm" fo:margin-top="0cm" fo:margin-bottom="0cm" table:align="left" style:writing-mode="page"/>
    </style:style>
    <style:style style:name="表格59.A" style:family="table-column">
      <style:table-column-properties style:column-width="16.228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60" style:family="table">
      <style:table-properties style:width="16.228cm" fo:margin-left="0.009cm" fo:margin-top="0cm" fo:margin-bottom="0cm" table:align="left" style:writing-mode="page"/>
    </style:style>
    <style:style style:name="表格60.A" style:family="table-column">
      <style:table-column-properties style:column-width="2.469cm"/>
    </style:style>
    <style:style style:name="表格60.B" style:family="table-column">
      <style:table-column-properties style:column-width="2.822cm"/>
    </style:style>
    <style:style style:name="表格60.C" style:family="table-column">
      <style:table-column-properties style:column-width="4.233cm"/>
    </style:style>
    <style:style style:name="表格60.D" style:family="table-column">
      <style:table-column-properties style:column-width="3.526cm"/>
    </style:style>
    <style:style style:name="表格60.E" style:family="table-column">
      <style:table-column-properties style:column-width="3.17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60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60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61" style:family="table">
      <style:table-properties style:width="16.228cm" fo:margin-left="0.009cm" fo:margin-top="0cm" fo:margin-bottom="0cm" table:align="left" style:writing-mode="page"/>
    </style:style>
    <style:style style:name="表格61.A" style:family="table-column">
      <style:table-column-properties style:column-width="16.228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  <style:text-properties fo:color="#aeb6c0" loext:opacity="100%" style:font-name="Arial" fo:font-size="12pt" fo:font-style="normal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ffffff" loext:opacity="100%" style:font-name="Arial" fo:font-size="26pt" fo:font-style="normal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P3" style:family="paragraph" style:parent-style-name="Standard">
      <style:paragraph-properties fo:margin-top="0cm" fo:margin-bottom="0.141cm" style:contextual-spacing="false" fo:text-align="center" style:justify-single-word="false"/>
      <style:text-properties fo:color="#aeb6c0" loext:opacity="100%" style:font-name="Arial" fo:font-size="14pt" fo:font-style="italic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P4" style:family="paragraph" style:parent-style-name="Standard">
      <style:paragraph-properties fo:margin-top="0cm" fo:margin-bottom="0.106cm" style:contextual-spacing="false" fo:text-align="center" style:justify-single-word="false"/>
      <style:text-properties fo:color="#f9e79f" loext:opacity="100%" style:font-name="Arial" fo:font-size="12pt" fo:font-style="normal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color="#aeb6c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" style:family="paragraph" style:parent-style-name="Standard">
      <style:paragraph-properties fo:margin-top="0.035cm" fo:margin-bottom="0.035cm" style:contextual-spacing="false" fo:text-align="left" style:justify-single-word="false"/>
    </style:style>
    <style:style style:name="P7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1.5pt" fo:font-style="normal" fo:font-weight="bold" style:font-name-asian="Arial2" style:font-size-asian="11.5pt" style:font-style-asian="normal" style:font-weight-asian="bold" style:font-name-complex="Arial2" style:font-size-complex="11.5pt" style:font-style-complex="normal" style:font-weight-complex="bold"/>
    </style:style>
    <style:style style:name="P8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" style:family="paragraph" style:parent-style-name="Heading_20_1">
      <loext:graphic-properties draw:fill="solid" draw:fill-color="#1f3864"/>
      <style:paragraph-properties fo:margin-left="0.353cm" fo:margin-top="0cm" fo:margin-bottom="0.353cm" style:contextual-spacing="false" fo:break-before="page" fo:background-color="#1f3864"/>
      <style:text-properties fo:color="#ffffff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10" style:family="paragraph" style:parent-style-name="Heading_20_2">
      <loext:graphic-properties draw:fill="solid" draw:fill-color="#2e75b6"/>
      <style:paragraph-properties fo:margin-left="0.282cm" fo:margin-top="0.423cm" fo:margin-bottom="0.282cm" style:contextual-spacing="false" fo:background-color="#2e75b6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1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2" style:family="paragraph" style:parent-style-name="Standard">
      <style:paragraph-properties fo:margin-top="0.053cm" fo:margin-bottom="0.053cm" style:contextual-spacing="false" fo:text-align="left" style:justify-single-word="false"/>
    </style:style>
    <style:style style:name="P13" style:family="paragraph" style:parent-style-name="Standard">
      <style:paragraph-properties fo:margin-top="0.053cm" fo:margin-bottom="0cm" style:contextual-spacing="false" fo:text-align="left" style:justify-single-word="false"/>
    </style:style>
    <style:style style:name="P14" style:family="paragraph" style:parent-style-name="Standard">
      <style:paragraph-properties fo:margin-top="0.106cm" fo:margin-bottom="0.106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5" style:family="paragraph" style:parent-style-name="Standard">
      <style:paragraph-properties fo:margin-top="0.035cm" fo:margin-bottom="0.035cm" style:contextual-spacing="false" fo:text-align="center" style:justify-single-word="false"/>
      <style:text-properties fo:color="#1f3864" loext:opacity="100%" style:font-name="Arial" fo:font-size="11.5pt" fo:font-style="normal" fo:font-weight="bold" style:font-name-asian="Arial2" style:font-size-asian="11.5pt" style:font-style-asian="normal" style:font-weight-asian="bold" style:font-name-complex="Arial2" style:font-size-complex="11.5pt" style:font-style-complex="normal" style:font-weight-complex="bold"/>
    </style:style>
    <style:style style:name="P16" style:family="paragraph" style:parent-style-name="Standard">
      <style:paragraph-properties fo:margin-left="1.411cm" fo:margin-top="0.018cm" fo:margin-bottom="0.018cm" style:contextual-spacing="false" fo:text-align="left" style:justify-single-word="false"/>
      <style:text-properties fo:color="#7f8c8d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7" style:family="paragraph" style:parent-style-name="Standard">
      <style:paragraph-properties fo:margin-top="0.141cm" fo:margin-bottom="0.071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8" style:family="paragraph" style:parent-style-name="Standard">
      <style:paragraph-properties fo:margin-top="0cm" fo:margin-bottom="0.106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9" style:family="paragraph" style:parent-style-name="Standard">
      <style:paragraph-properties fo:margin-top="0.035cm" fo:margin-bottom="0.106cm" style:contextual-spacing="false" fo:text-align="left" style:justify-single-word="false"/>
      <style:text-properties fo:color="#c0392b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0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21" style:family="paragraph" style:parent-style-name="Standard">
      <style:paragraph-properties fo:margin-top="0.018cm" fo:margin-bottom="0.071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22" style:family="paragraph" style:parent-style-name="Standard">
      <style:paragraph-properties fo:margin-top="0.035cm" fo:margin-bottom="0.035cm" style:contextual-spacing="false" fo:text-align="left" style:justify-single-word="false"/>
      <style:text-properties fo:color="#c0392b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Standard">
      <style:paragraph-properties fo:margin-top="0.035cm" fo:margin-bottom="0.106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4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5" style:family="paragraph" style:parent-style-name="Standard">
      <style:paragraph-properties fo:margin-top="0cm" fo:margin-bottom="0.106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6" style:family="paragraph" style:parent-style-name="Standard">
      <style:paragraph-properties fo:margin-top="0.035cm" fo:margin-bottom="0.053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7" style:family="paragraph" style:parent-style-name="Standard">
      <style:paragraph-properties fo:margin-left="0.635cm" fo:margin-top="0.018cm" fo:margin-bottom="0.018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8" style:family="paragraph" style:parent-style-name="Standard">
      <style:paragraph-properties fo:margin-left="0.635cm" fo:margin-top="0.018cm" fo:margin-bottom="0.071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0" style:family="paragraph" style:parent-style-name="Standard">
      <style:paragraph-properties fo:margin-top="0cm" fo:margin-bottom="0.071cm" style:contextual-spacing="false" fo:text-align="left" style:justify-single-word="false"/>
      <style:text-properties fo:color="#00000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1" style:family="paragraph" style:parent-style-name="Standard">
      <style:paragraph-properties fo:margin-top="0.035cm" fo:margin-bottom="0.071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2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3" style:family="paragraph" style:parent-style-name="Standard">
      <style:paragraph-properties fo:margin-top="0cm" fo:margin-bottom="0.106cm" style:contextual-spacing="false" fo:text-align="left" style:justify-single-word="false"/>
      <style:text-properties fo:color="#27ae60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34" style:family="paragraph" style:parent-style-name="Standard">
      <style:paragraph-properties fo:margin-top="0.035cm" fo:margin-bottom="0.035cm" style:contextual-spacing="false" fo:text-align="center" style:justify-single-word="false"/>
      <style:text-properties fo:color="#1f3864" loext:opacity="100%" style:font-name="Arial" fo:font-size="12pt" fo:font-style="normal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35" style:family="paragraph" style:parent-style-name="Standard">
      <style:paragraph-properties fo:margin-top="0.071cm" fo:margin-bottom="0cm" style:contextual-spacing="false" fo:text-align="center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36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7" style:family="paragraph" style:parent-style-name="Standard">
      <style:paragraph-properties fo:margin-top="0.035cm" fo:margin-bottom="0.106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38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9" style:family="paragraph" style:parent-style-name="Standard">
      <style:paragraph-properties fo:margin-top="0.035cm" fo:margin-bottom="0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40" style:family="paragraph" style:parent-style-name="Standard">
      <style:paragraph-properties fo:margin-top="0.035cm" fo:margin-bottom="0.106cm" style:contextual-spacing="false" fo:text-align="center" style:justify-single-word="false"/>
      <style:text-properties fo:color="#1f3864" loext:opacity="100%" style:font-name="Arial" fo:font-size="12pt" fo:font-style="normal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41" style:family="paragraph" style:parent-style-name="Standard">
      <style:paragraph-properties fo:margin-top="0cm" fo:margin-bottom="0.035cm" style:contextual-spacing="false" fo:text-align="center" style:justify-single-word="false"/>
      <style:text-properties fo:color="#2e75b6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2" style:family="paragraph" style:parent-style-name="Standard">
      <style:paragraph-properties fo:margin-top="0.071cm" fo:margin-bottom="0.07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43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44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6" style:family="paragraph" style:parent-style-name="Standard">
      <style:paragraph-properties fo:margin-top="0.009cm" fo:margin-bottom="0.009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7" style:family="paragraph" style:parent-style-name="Standard">
      <style:paragraph-properties fo:margin-top="0.009cm" fo:margin-bottom="0.053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8" style:family="paragraph" style:parent-style-name="Standard">
      <style:paragraph-properties fo:margin-top="0.009cm" fo:margin-bottom="0.035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9" style:family="paragraph" style:parent-style-name="Standard">
      <style:paragraph-properties fo:margin-top="0.018cm" fo:margin-bottom="0.018cm" style:contextual-spacing="false" fo:text-align="left" style:justify-single-word="false"/>
      <style:text-properties fo:color="#c0392b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50" style:family="paragraph" style:parent-style-name="Standard">
      <style:paragraph-properties fo:margin-top="0.035cm" fo:margin-bottom="0cm" style:contextual-spacing="false" fo:text-align="left" style:justify-single-word="false"/>
      <style:text-properties fo:color="#27ae60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51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2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53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ffd740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4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1de9b6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5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e040fb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6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3d00" loext:opacity="100%" style:font-name="Arial" fo:font-size="9pt" fo:font-style="normal" fo:font-weight="bold" fo:background-color="#64ffda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7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00" loext:opacity="100%" style:font-name="Arial" fo:font-size="9pt" fo:font-style="normal" fo:font-weight="bold" fo:background-color="#ff1744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8" style:family="paragraph" style:parent-style-name="Standard">
      <style:paragraph-properties fo:margin-top="0cm" fo:margin-bottom="0.106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59" style:family="paragraph" style:parent-style-name="Standard">
      <style:paragraph-properties fo:margin-top="0.035cm" fo:margin-bottom="0.071cm" style:contextual-spacing="false" fo:text-align="center" style:justify-single-word="false"/>
      <style:text-properties fo:color="#2e75b6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60" style:family="paragraph" style:parent-style-name="Standard">
      <style:paragraph-properties fo:margin-top="0.035cm" fo:margin-bottom="0cm" style:contextual-spacing="false" fo:text-align="center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61" style:family="paragraph" style:parent-style-name="Standard">
      <style:paragraph-properties fo:margin-top="0.014cm" fo:margin-bottom="0.014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62" style:family="paragraph" style:parent-style-name="Standard">
      <style:paragraph-properties fo:margin-top="0.106cm" fo:margin-bottom="0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63" style:family="paragraph" style:parent-style-name="Standard">
      <style:paragraph-properties fo:margin-top="0cm" fo:margin-bottom="0.106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64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5" style:family="paragraph" style:parent-style-name="Standard">
      <style:paragraph-properties fo:margin-top="0.009cm" fo:margin-bottom="0.009cm" style:contextual-spacing="false" fo:text-align="left" style:justify-single-word="false"/>
      <style:text-properties fo:color="#27ae60" loext:opacity="100%" style:font-name="Courier New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P66" style:family="paragraph" style:parent-style-name="Standard">
      <style:paragraph-properties fo:margin-top="0.009cm" fo:margin-bottom="0.035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7" style:family="paragraph" style:parent-style-name="Standard">
      <style:paragraph-properties fo:margin-top="0.018cm" fo:margin-bottom="0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8" style:family="paragraph" style:parent-style-name="Standard">
      <style:paragraph-properties fo:margin-top="0.009cm" fo:margin-bottom="0.009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9" style:family="paragraph" style:parent-style-name="Standard">
      <style:paragraph-properties fo:margin-top="0.009cm" fo:margin-bottom="0.035cm" style:contextual-spacing="false" fo:text-align="left" style:justify-single-word="false"/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70" style:family="paragraph" style:parent-style-name="Standard">
      <style:paragraph-properties fo:margin-top="0.009cm" fo:margin-bottom="0.009cm" style:contextual-spacing="false" fo:text-align="left" style:justify-single-word="false"/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71" style:family="paragraph" style:parent-style-name="Standard">
      <style:paragraph-properties fo:margin-top="0.009cm" fo:margin-bottom="0.035cm" style:contextual-spacing="false" fo:text-align="left" style:justify-single-word="false"/>
      <style:text-properties fo:color="#27ae60" loext:opacity="100%" style:font-name="Courier New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P72" style:family="paragraph" style:parent-style-name="Standard">
      <style:paragraph-properties fo:margin-top="0cm" fo:margin-bottom="0.071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3" style:family="paragraph" style:parent-style-name="Standard">
      <style:paragraph-properties fo:margin-top="0.018cm" fo:margin-bottom="0.018cm" style:contextual-spacing="false" fo:text-align="left" style:justify-single-word="false"/>
      <style:text-properties fo:color="#c6ff00" loext:opacity="100%" style:font-name="Arial" fo:font-size="10.5pt" fo:font-style="normal" fo:font-weight="bold" fo:background-color="#f50057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4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5" style:family="paragraph" style:parent-style-name="Standard">
      <style:paragraph-properties fo:margin-top="0.018cm" fo:margin-bottom="0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76" style:family="paragraph" style:parent-style-name="Standard">
      <style:paragraph-properties fo:margin-top="0.018cm" fo:margin-bottom="0.035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7" style:family="paragraph" style:parent-style-name="Standard">
      <style:paragraph-properties fo:margin-top="0.018cm" fo:margin-bottom="0cm" style:contextual-spacing="false" fo:text-align="left" style:justify-single-word="false"/>
      <style:text-properties fo:color="#27ae60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78" style:family="paragraph" style:parent-style-name="Standard">
      <style:paragraph-properties fo:margin-top="0cm" fo:margin-bottom="0.141cm" style:contextual-spacing="false" fo:text-align="left" style:justify-single-word="false"/>
      <style:text-properties fo:color="#e040fb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79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18ffff" loext:opacity="100%" style:font-name="Arial" fo:font-size="10.5pt" fo:font-style="normal" fo:font-weight="bold" fo:background-color="#d500f9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80" style:family="paragraph" style:parent-style-name="Standard">
      <style:paragraph-properties fo:margin-top="0.011cm" fo:margin-bottom="0.011cm" style:contextual-spacing="false"/>
      <style:text-properties fo:color="#e8eaf6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1" style:family="paragraph" style:parent-style-name="Standard">
      <style:paragraph-properties fo:margin-top="0.011cm" fo:margin-bottom="0.011cm" style:contextual-spacing="false"/>
      <style:text-properties fo:color="#ffe082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2" style:family="paragraph" style:parent-style-name="Standard">
      <style:paragraph-properties fo:margin-top="0.011cm" fo:margin-bottom="0.011cm" style:contextual-spacing="false"/>
      <style:text-properties fo:color="#546e7a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3" style:family="paragraph" style:parent-style-name="Standard">
      <style:paragraph-properties fo:margin-top="0.011cm" fo:margin-bottom="0.011cm" style:contextual-spacing="false"/>
      <style:text-properties fo:color="#69f0ae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4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85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86" style:family="paragraph" style:parent-style-name="Standard">
      <style:paragraph-properties fo:margin-top="0.035cm" fo:margin-bottom="0.035cm" style:contextual-spacing="false" fo:text-align="left" style:justify-single-word="false"/>
      <style:text-properties fo:color="#18ffff" loext:opacity="100%" style:font-name="Arial" fo:font-size="10pt" fo:font-style="normal" fo:font-weight="bold" fo:background-color="#d500f9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87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3d00" loext:opacity="100%" style:font-name="Arial" fo:font-size="10pt" fo:font-style="normal" fo:font-weight="bold" fo:background-color="#64ffda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88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officeooo:paragraph-rsid="0089ed4a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89" style:family="paragraph" style:parent-style-name="Standard">
      <style:paragraph-properties fo:margin-top="0.053cm" fo:margin-bottom="0.053cm" style:contextual-spacing="false" fo:text-align="left" style:justify-single-word="false"/>
      <style:text-properties fo:color="#ffd740" loext:opacity="100%" style:font-name="Arial" fo:font-size="10.5pt" fo:font-style="normal" fo:font-weight="bold" fo:background-color="#000000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0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officeooo:paragraph-rsid="00a784a1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1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e676" loext:opacity="100%" style:font-name="Arial" fo:font-size="10.5pt" fo:font-style="normal" fo:font-weight="bold" fo:background-color="#3d5afe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2" style:family="paragraph" style:parent-style-name="Standard">
      <style:paragraph-properties fo:margin-top="0.053cm" fo:margin-bottom="0.053cm" style:contextual-spacing="false" fo:text-align="left" style:justify-single-word="false"/>
      <style:text-properties fo:color="#ffff00" loext:opacity="100%" style:font-name="Arial" fo:font-size="10.5pt" fo:font-style="normal" fo:font-weight="bold" fo:background-color="#3d5afe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3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pt" fo:font-style="normal" fo:font-weight="bold" fo:background-color="#ffff00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94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5" style:family="paragraph" style:parent-style-name="Standard">
      <style:paragraph-properties fo:margin-top="0.011cm" fo:margin-bottom="0.011cm" style:contextual-spacing="false" fo:text-align="left" style:justify-single-word="false"/>
    </style:style>
    <style:style style:name="P96" style:family="paragraph" style:parent-style-name="Standard">
      <style:paragraph-properties fo:margin-top="0cm" fo:margin-bottom="0.07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7" style:family="paragraph" style:parent-style-name="Standard">
      <style:paragraph-properties fo:margin-top="0cm" fo:margin-bottom="0.071cm" style:contextual-spacing="false" fo:text-align="left" style:justify-single-word="false"/>
      <style:text-properties fo:color="#c0392b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8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9" style:family="paragraph" style:parent-style-name="Heading_20_2">
      <loext:graphic-properties draw:fill="solid" draw:fill-color="#2e75b6"/>
      <style:paragraph-properties fo:margin-left="0.282cm" fo:margin-top="0.423cm" fo:margin-bottom="0.282cm" style:contextual-spacing="false" fo:background-color="#2e75b6"/>
    </style:style>
    <style:style style:name="P100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.5pt" fo:font-style="normal" fo:font-weight="normal" style:font-name-asian="Courier New1" style:font-size-asian="9.5pt" style:font-style-asian="normal" style:font-weight-asian="normal" style:font-name-complex="Courier New1" style:font-size-complex="9.5pt" style:font-style-complex="normal" style:font-weight-complex="normal"/>
    </style:style>
    <style:style style:name="P101" style:family="paragraph" style:parent-style-name="Standard">
      <style:paragraph-properties fo:margin-top="0.009cm" fo:margin-bottom="0.009cm" style:contextual-spacing="false" fo:text-align="left" style:justify-single-word="false"/>
    </style:style>
    <style:style style:name="P102" style:family="paragraph" style:parent-style-name="Standard">
      <style:paragraph-properties fo:margin-top="0.018cm" fo:margin-bottom="0.035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3" style:family="paragraph" style:parent-style-name="Standard">
      <style:paragraph-properties fo:margin-top="0.009cm" fo:margin-bottom="0.009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4" style:family="paragraph" style:parent-style-name="Standard">
      <style:paragraph-properties fo:margin-top="0.009cm" fo:margin-bottom="0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5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6" style:family="paragraph" style:parent-style-name="Standard">
      <style:paragraph-properties fo:margin-top="0.035cm" fo:margin-bottom="0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7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9.5pt" fo:font-style="normal" fo:font-weight="bold" style:font-name-asian="Arial2" style:font-size-asian="9.5pt" style:font-style-asian="normal" style:font-weight-asian="bold" style:font-name-complex="Arial2" style:font-size-complex="9.5pt" style:font-style-complex="normal" style:font-weight-complex="bold"/>
    </style:style>
    <style:style style:name="P108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.5pt" fo:font-style="normal" fo:font-weight="normal" style:font-name-asian="Arial2" style:font-size-asian="9.5pt" style:font-style-asian="normal" style:font-weight-asian="normal" style:font-name-complex="Arial2" style:font-size-complex="9.5pt" style:font-style-complex="normal" style:font-weight-complex="normal"/>
    </style:style>
    <style:style style:name="P109" style:family="paragraph" style:parent-style-name="Standard">
      <style:paragraph-properties fo:margin-top="0.035cm" fo:margin-bottom="0.071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110" style:family="paragraph" style:parent-style-name="Standard">
      <style:paragraph-properties fo:margin-top="0.035cm" fo:margin-bottom="0cm" style:contextual-spacing="false" fo:text-align="center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11" style:family="paragraph" style:parent-style-name="Standard">
      <style:paragraph-properties fo:margin-top="0.106cm" fo:margin-bottom="0.035cm" style:contextual-spacing="false" fo:text-align="center" style:justify-single-word="false"/>
      <style:text-properties fo:color="#7f8c8d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112" style:family="paragraph" style:parent-style-name="Standard">
      <style:paragraph-properties fo:margin-top="0cm" fo:margin-bottom="0cm" style:contextual-spacing="false" fo:text-align="center" style:justify-single-word="false"/>
      <style:text-properties fo:color="#1f3864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1" style:family="text">
      <style:text-properties fo:color="#000000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2" style:family="text"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T3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5" style:family="text">
      <style:text-properties fo:color="#18ffff" loext:opacity="100%" fo:background-color="#d500f9" loext:char-shading-value="0"/>
    </style:style>
    <style:style style:name="T6" style:family="text">
      <style:text-properties fo:color="#1de9b6" loext:opacity="100%" fo:background-color="#6d4c41" loext:char-shading-value="0"/>
    </style:style>
    <style:style style:name="T7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8" style:family="text">
      <style:text-properties fo:font-weight="bold" fo:background-color="#ffd740" loext:char-shading-value="0" style:font-weight-asian="bold" style:font-weight-complex="bold"/>
    </style:style>
    <style:style style:name="T9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background-color="#ffff00" loext:char-shading-value="0"/>
    </style:style>
    <style:style style:name="T12" style:family="text">
      <style:text-properties fo:color="#ffd740" loext:opacity="100%" fo:background-color="#000000" loext:char-shading-value="0"/>
    </style:style>
    <style:style style:name="T13" style:family="text">
      <style:text-properties fo:color="#c6ff00" loext:opacity="100%" fo:background-color="#000000" loext:char-shading-value="0"/>
    </style:style>
    <style:style style:name="T14" style:family="text">
      <style:text-properties fo:font-weight="bold" fo:background-color="#c6ff00" loext:char-shading-value="0" style:font-weight-asian="bold" style:font-weight-complex="bold"/>
    </style:style>
    <style:style style:name="T1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7" style:family="text">
      <style:text-properties fo:color="#1de9b6" loext:opacity="100%" fo:font-weight="bold" fo:background-color="#000000" loext:char-shading-value="0" style:font-weight-asian="bold" style:font-weight-complex="bold"/>
    </style:style>
    <style:style style:name="T18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1" style:family="text">
      <style:text-properties fo:color="#00e676" loext:opacity="100%" fo:font-weight="bold" style:font-weight-asian="bold" style:font-weight-complex="bold"/>
    </style:style>
    <style:style style:name="T22" style:family="text">
      <style:text-properties fo:color="#1de9b6" loext:opacity="100%" fo:font-weight="bold" fo:background-color="#6d4c41" loext:char-shading-value="0" style:font-weight-asian="bold" style:font-weight-complex="bold"/>
    </style:style>
    <style:style style:name="T23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24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25" style:family="text">
      <style:text-properties fo:background-color="#000000" loext:char-shading-value="0"/>
    </style:style>
    <style:style style:name="T26" style:family="text">
      <style:text-properties fo:color="#ffff00" loext:opacity="100%" fo:background-color="#ff9100" loext:char-shading-value="0"/>
    </style:style>
    <style:style style:name="T27" style:family="text">
      <style:text-properties fo:background-color="#ffea00" loext:char-shading-value="0"/>
    </style:style>
    <style:style style:name="T28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9" style:family="text">
      <style:text-properties fo:background-color="#ffd740" loext:char-shading-value="0"/>
    </style:style>
    <style:style style:name="T30" style:family="text">
      <style:text-properties fo:color="#40c4ff" loext:opacity="100%" fo:background-color="#5d4037" loext:char-shading-value="0"/>
    </style:style>
    <style:style style:name="T31" style:family="text">
      <style:text-properties fo:color="#ff3d00" loext:opacity="100%" fo:font-weight="bold" fo:background-color="#00e676" loext:char-shading-value="0" style:font-weight-asian="bold" style:font-weight-complex="bold"/>
    </style:style>
    <style:style style:name="T32" style:family="text">
      <style:text-properties fo:font-weight="bold" fo:background-color="#18ffff" loext:char-shading-value="0" style:font-weight-asian="bold" style:font-weight-complex="bold"/>
    </style:style>
    <style:style style:name="T33" style:family="text">
      <style:text-properties fo:color="#ff3d00" loext:opacity="100%" fo:font-weight="bold" fo:background-color="#76ff03" loext:char-shading-value="0" style:font-weight-asian="bold" style:font-weight-complex="bold"/>
    </style:style>
    <style:style style:name="T34" style:family="text">
      <style:text-properties fo:color="#2979ff" loext:opacity="100%" fo:font-weight="bold" fo:background-color="#ffff00" loext:char-shading-value="0" style:font-weight-asian="bold" style:font-weight-complex="bold"/>
    </style:style>
    <style:style style:name="T35" style:family="text">
      <style:text-properties fo:color="#76ff03" loext:opacity="100%" fo:font-weight="bold" fo:background-color="#d500f9" loext:char-shading-value="0" style:font-weight-asian="bold" style:font-weight-complex="bold"/>
    </style:style>
    <style:style style:name="T36" style:family="text">
      <style:text-properties fo:background-color="#ffc400" loext:char-shading-value="0"/>
    </style:style>
    <style:style style:name="T37" style:family="text">
      <style:text-properties fo:color="#ff1744" loext:opacity="100%" fo:background-color="#ffff00" loext:char-shading-value="0"/>
    </style:style>
    <style:style style:name="T38" style:family="text">
      <style:text-properties fo:color="#000000" loext:opacity="100%" fo:background-color="#ffff00" loext:char-shading-value="0"/>
    </style:style>
    <style:style style:name="T39" style:family="text">
      <style:text-properties fo:color="#e67e22" loext:opacity="100%" fo:font-weight="bold" style:font-weight-asian="bold" style:font-weight-complex="bold"/>
    </style:style>
    <style:style style:name="T40" style:family="text">
      <style:text-properties fo:color="#e67e22" loext:opacity="100%" fo:font-weight="bold" fo:background-color="#ffff00" loext:char-shading-value="0" style:font-weight-asian="bold" style:font-weight-complex="bold"/>
    </style:style>
    <style:style style:name="T41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2" style:family="text">
      <style:text-properties fo:color="#2979ff" loext:opacity="100%" fo:font-weight="bold" fo:background-color="#bcaaa4" loext:char-shading-value="0" style:font-weight-asian="bold" style:font-weight-complex="bold"/>
    </style:style>
    <style:style style:name="T43" style:family="text">
      <style:text-properties fo:color="#f50057" loext:opacity="100%" fo:font-weight="bold" fo:background-color="#bcaaa4" loext:char-shading-value="0" style:font-weight-asian="bold" style:font-weight-complex="bold"/>
    </style:style>
    <style:style style:name="T44" style:family="text">
      <style:text-properties fo:background-color="#ffff00" loext:char-shading-value="0"/>
    </style:style>
    <style:style style:name="T45" style:family="text">
      <style:text-properties fo:color="#ff3d00" loext:opacity="100%" fo:background-color="#64ffda" loext:char-shading-value="0"/>
    </style:style>
    <style:style style:name="T4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76ff03" loext:opacity="100%" fo:font-weight="bold" fo:background-color="#ff1744" loext:char-shading-value="0" style:font-weight-asian="bold" style:font-weight-complex="bold"/>
    </style:style>
    <style:style style:name="T48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9" style:family="text">
      <style:text-properties fo:color="#f50057" loext:opacity="100%" fo:font-weight="bold" fo:background-color="#f8bbd0" loext:char-shading-value="0" style:font-weight-asian="bold" style:font-weight-complex="bold"/>
    </style:style>
    <style:style style:name="T50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51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52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3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54" style:family="text">
      <style:text-properties fo:font-weight="bold" fo:background-color="#ffd740" loext:char-shading-value="0" style:font-weight-asian="bold" style:font-weight-complex="bold"/>
    </style:style>
    <style:style style:name="T55" style:family="text">
      <style:text-properties fo:font-weight="bold" fo:background-color="#ffff00" loext:char-shading-value="0" style:font-weight-asian="bold" style:font-weight-complex="bold"/>
    </style:style>
    <style:style style:name="T56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57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58" style:family="text">
      <style:text-properties fo:background-color="#ffd740" loext:char-shading-value="0"/>
    </style:style>
    <style:style style:name="T59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60" style:family="text">
      <style:text-properties fo:color="#b2ff59" loext:opacity="100%" fo:font-weight="bold" fo:background-color="#3d5afe" loext:char-shading-value="0" style:font-weight-asian="bold" style:font-weight-complex="bold"/>
    </style:style>
    <style:style style:name="T61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62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63" style:family="text"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4" style:family="text"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第 15 章</text:p>
            <text:p text:style-name="P2">最小擴張樹 MST</text:p>
            <text:p text:style-name="P3">Minimum Spanning Tree</text:p>
            <text:p text:style-name="P4">Prim <text:s/>／ <text:s/>Kruskal <text:s/>／ <text:s/>Sollin（Borůvka）</text:p>
            <text:p text:style-name="P5">圖解 × 逐步推導 × 程式實作 × 公職考試完整版</text:p>
          </table:table-cell>
        </table:table-row>
      </table:table>
      <text:p text:style-name="P6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7">📖 本章學習地圖</text:p>
            <text:p text:style-name="P8">第一章：MST 是什麼？基本概念 + 名詞解釋</text:p>
            <text:p text:style-name="P8">第二章：三種演算法快速比較表</text:p>
            <text:p text:style-name="P8">第三章：Prim 演算法 ── 圖解 + 逐步推導 + C++ 程式碼</text:p>
            <text:p text:style-name="P8">第四章：Kruskal 演算法 ── 圖解 + Union-Find + C++ 程式碼</text:p>
            <text:p text:style-name="P8">第五章：Sollin 演算法 ── 圖解 + 逐步推導 + C++ 程式碼</text:p>
            <text:p text:style-name="P8">第六章：113閩 Q5 公職真題完整解題</text:p>
            <text:p text:style-name="P8">第七章：考試速查卡（背誦版）</text:p>
          </table:table-cell>
        </table:table-row>
      </table:table>
      <text:p text:style-name="P6"/>
      <text:p text:style-name="Standard"/>
      <text:h text:style-name="P9" text:outline-level="1">一、MST 基本概念 ── 新手從這裡開始</text:h>
      <text:p text:style-name="P6"/>
      <text:h text:style-name="P10" text:outline-level="2">1-1 先搞懂名詞：圖、節點、邊、權重</text:h>
      <text:p text:style-name="P6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1">📌 新手名詞解釋（一定要先懂這些！）</text:p>
            <text:p text:style-name="P12"><text:span text:style-name="T1">圖（Graph）：</text:span><text:span text:style-name="T2">由「點」和「線」組成的一種資料結構。例如：城市地圖就是一個圖。</text:span></text:p>
            <text:p text:style-name="P12"><text:span text:style-name="T1">節點（Node / Vertex）：</text:span><text:span text:style-name="T2">圖裡面的每個點。例如：城市 A、B、C。</text:span></text:p>
            <text:p text:style-name="P12"><text:span text:style-name="T1">邊（Edge）：</text:span><text:span text:style-name="T2">連接兩個節點的線段。例如：A 到 B 的道路。</text:span></text:p>
            <text:p text:style-name="P12"><text:span text:style-name="T1">權重（Weight）：</text:span><text:span text:style-name="T2">邊上的數字，代表距離、費用、時間等。例如：A 到 B 要走 3 公里。</text:span></text:p>
            <text:p text:style-name="P13"><text:span text:style-name="T1">連通圖（Connected Graph）：</text:span><text:span text:style-name="T2">任兩個節點之間都找得到路徑可以互達，不能有孤立點。</text:span></text:p>
          </table:table-cell>
        </table:table-row>
      </table:table>
      <text:p text:style-name="P6"/>
      <text:h text:style-name="P10" text:outline-level="2">1-2 MST 的定義</text:h>
      <text:p text:style-name="P6"/>
      <text:p text:style-name="P14">想像你要在 4 個城市之間鋪設電纜，每兩個城市之間都可以連線，但每條線有建設費用。你想「<text:span text:style-name="T3">用最低費用</text:span>，<text:span text:style-name="T4">讓每個城市都連通</text:span>」── 這就是 MST 要解決的問題！</text:p>
      <text:p text:style-name="P6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5">MST（最小生成樹）= 生成樹（Spanning Tree）+ <text:span text:style-name="T5">總權重最小（Minimum）</text:span></text:p>
            <text:p text:style-name="P16">（台灣教材兩種譯名並用：「最小生成樹」與「最小擴張樹」，公職考試兩者皆可，本筆記統一使用最小擴張樹）</text:p>
          </table:table-cell>
        </table:table-row>
      </table:table>
      <text:p text:style-name="P6"/>
      <text:p text:style-name="P17">條件 1：<text:span text:style-name="T6">覆蓋所有節點（Spanning）</text:span></text:p>
      <text:p text:style-name="P18"><text:span text:style-name="T7">每個城市都必須被電纜接到</text:span>，不能有孤立的城市存在。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9">❌ 不是生成樹</text:p>
            <text:p text:style-name="P20">A──B</text:p>
            <text:p text:style-name="P21"><text:s text:c="4"/>C──D</text:p>
            <text:p text:style-name="P22">A、B 一組，C、D 另一組，無法互通。</text:p>
          </table:table-cell>
          <table:table-cell table:style-name="表格5.B1" office:value-type="string">
            <text:p text:style-name="P23">✅ 覆蓋所有節點</text:p>
            <text:p text:style-name="P20">A──B</text:p>
            <text:p text:style-name="P20">|</text:p>
            <text:p text:style-name="P21">C──D</text:p>
            <text:p text:style-name="P24">A、B、C、D 全部被電纜接到。</text:p>
          </table:table-cell>
        </table:table-row>
      </table:table>
      <text:p text:style-name="P6"/>
      <text:p text:style-name="P17">條件 2：<text:span text:style-name="T6">不能有迴路（Cycle）</text:span></text:p>
      <text:p text:style-name="P18">電纜不能繞成圈。<text:span text:style-name="T8">只要有迴路，就代表有一條邊是多餘的</text:span>、可以省去的。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19">❌ 有迴路，不合法</text:p>
            <text:p text:style-name="P20">A──B</text:p>
            <text:p text:style-name="P20">| <text:s/>|</text:p>
            <text:p text:style-name="P21">D──C</text:p>
            <text:p text:style-name="P22">A→B→C→D→A 可以繞一圈，形成 Cycle。</text:p>
          </table:table-cell>
          <table:table-cell table:style-name="表格6.B1" office:value-type="string">
            <text:p text:style-name="P23">✅ 去掉一條，仍連通</text:p>
            <text:p text:style-name="P20">A──B</text:p>
            <text:p text:style-name="P20"><text:s text:c="3"/>|</text:p>
            <text:p text:style-name="P21">D──C</text:p>
            <text:p text:style-name="P24">移除最貴的邊，四個城市依然可以互達。</text:p>
          </table:table-cell>
        </table:table-row>
      </table:table>
      <text:p text:style-name="P6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5">為什麼有迴路的圖一定不能是生成樹（更不能是 MST）？</text:p>
            <text:p text:style-name="P26">根本原因：<text:span text:style-name="T7">生成樹的定義要求「無 Cycle」</text:span>。<text:span text:style-name="T3">有迴路的連通圖不是 Tree，所以直接不符合生成樹的定義</text:span>。</text:p>
            <text:p text:style-name="P8"/>
            <text:p text:style-name="P27">進一步說明（以 A─B─C─A 三角形為例）：</text:p>
            <text:p text:style-name="P27">• 去掉其中任何一條邊，三個城市仍然透過另外兩條邊互通</text:p>
            <text:p text:style-name="P28">• 刪掉最貴那條邊後，費用更低且連通性不變</text:p>
            <text:p text:style-name="P28"><text:soft-page-break/>• 所以<text:span text:style-name="T9">有 Cycle 的圖裡，至少有一條邊是「可以刪掉且不影響連通」的多餘邊</text:span></text:p>
            <text:p text:style-name="P8"/>
            <text:p text:style-name="P29">➡ 有迴路 = 不是生成樹 = 一定不是 MST</text:p>
            <text:p text:style-name="P16">（不是因為「費用一定更高」，而是因為根本不符合 Tree 的定義）</text:p>
          </table:table-cell>
        </table:table-row>
      </table:table>
      <text:p text:style-name="P6"/>
      <text:p text:style-name="P17">由以上兩個條件推出的重要結論：<text:span text:style-name="T5">邊數一定是 V−1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8">「V−1 條邊」不是第三個獨立條件，而是由「覆蓋所有節點 + 無 Cycle」自然推導出來的結果。</text:p>
            <text:p text:style-name="P30">對 V 個節點而言：</text:p>
          </table:table-cell>
        </table:table-row>
      </table:table>
      <text:p text:style-name="P6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9">邊數 &lt; V−1 <text:s/>→ <text:s/>一定不連通</text:p>
            <text:p text:style-name="P31">例：4 個城市，只有 2 條邊：</text:p>
            <text:p text:style-name="P21">A──B <text:s text:c="4"/>C──D</text:p>
            <text:p text:style-name="P32">A、B 是一組，C、D 是另一組，永遠無法互達。</text:p>
          </table:table-cell>
          <table:table-cell table:style-name="表格9.A1" office:value-type="string">
            <text:p text:style-name="P19">邊數 &gt; V−1 <text:s/>→ <text:s/>一定有 Cycle</text:p>
            <text:p text:style-name="P31">例：4 個城市，有 4 條邊：</text:p>
            <text:p text:style-name="P21">A──B <text:s/>| <text:s/>| <text:s/>D──C</text:p>
            <text:p text:style-name="P32">A→B→C→D→A 形成迴路，必定有多餘的邊。</text:p>
          </table:table-cell>
        </table:table-row>
      </table:table>
      <text:p text:style-name="P6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33">✅ 重要定理：</text:p>
            <text:p text:style-name="P34">「連通 + 無 Cycle」 <text:s/>⟺ <text:s/>「恰好 V−1 條邊」</text:p>
            <text:p text:style-name="P35">例：4 個節點，MST 必有 4−1 = 3 條邊。</text:p>
          </table:table-cell>
        </table:table-row>
      </table:table>
      <text:p text:style-name="P6"/>
      <text:p text:style-name="P17">條件 3：<text:span text:style-name="T6">在所有生成樹中，選總權重最小的那棵（Minimum）</text:span></text:p>
      <text:p text:style-name="P18"><text:span text:style-name="T10">滿足條件 1 和條件 2 的生成樹可能有很多棵</text:span>，MST 要從中<text:span text:style-name="T7">選出總費用最低的那一棵</text:span>。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6">舉例：4 個城市，邊的費用如下</text:p>
            <text:p text:style-name="P37">AB = 1，BD = 2，CD = 3，AC = 4</text:p>
            <text:p text:style-name="P38">方案 A：AB + BD + CD = 1 + 2 + 3 = 6 <text:s/>✅ 費用最低，這就是 MST</text:p>
            <text:p text:style-name="P39">方案 B：AB + BD + AC = 1 + 2 + 4 = 7 <text:s/>❌ 雖然合法，但費用較高</text:p>
          </table:table-cell>
        </table:table-row>
      </table:table>
      <text:p text:style-name="P6"/>
      <text:p text:style-name="P17">一句話記憶 &amp; 邏輯順序總結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40"><text:span text:style-name="T11">MST</text:span> = <text:span text:style-name="T12">覆蓋所有節點</text:span> <text:s/>+ <text:s/><text:span text:style-name="T13">沒有 Cycle</text:span> <text:s/>+ <text:s/><text:span text:style-name="T5">總權重最小</text:span></text:p>
            <text:p text:style-name="P41">且一定具有：<text:span text:style-name="T3">邊數 E = V − 1</text:span>（推論結果，非獨立條件）</text:p>
          </table:table-cell>
        </table:table-row>
      </table:table>
      <text:p text:style-name="P6"/>
      <text:p text:style-name="P42">正確的思考順序：</text:p>
      <text:p text:style-name="P43">① <text:span text:style-name="T10">覆蓋所有節點</text:span>（每個城市都要接到）</text:p>
      <text:p text:style-name="P16">↓</text:p>
      <text:p text:style-name="P43">② <text:span text:style-name="T14">不能有 Cycle</text:span>（有環就有多餘的邊，去掉更省）</text:p>
      <text:p text:style-name="P16">↓</text:p>
      <text:p text:style-name="P43">③ 因此<text:span text:style-name="T3">邊數一定是 V−1</text:span>（自然推導）</text:p>
      <text:p text:style-name="P16">↓</text:p>
      <text:p text:style-name="P43">④ 在所有符合以上條件的生成樹中，挑<text:span text:style-name="T15">總權重最小者</text:span></text:p>
      <text:p text:style-name="P16">↓</text:p>
      <text:p text:style-name="P44">✅ 就是 MST</text:p>
      <text:p text:style-name="P6"/>
      <text:h text:style-name="P10" text:outline-level="2">1-3 圖解：原始圖 vs MST</text:h>
      <text:p text:style-name="P6"/>
      <table:table table:name="表格13" table:style-name="表格13">
        <table:table-column table:style-name="表格13.A"/>
        <text:soft-page-break/>
        <table:table-row table:style-name="表格13.1">
          <table:table-cell table:style-name="表格13.A1" office:value-type="string">
            <text:p text:style-name="P45">原始圖（所有邊）： <text:s text:c="18"/>MST（花最少錢連通所有城市）：</text:p>
            <text:p text:style-name="P46"><text:s text:c="9"/>A <text:s text:c="31"/>A</text:p>
            <text:p text:style-name="P46"><text:s text:c="8"/>/ \ <text:s text:c="29"/>/</text:p>
            <text:p text:style-name="P46"><text:s text:c="7"/>1 <text:s text:c="2"/>4 <text:s text:c="4"/>← 4條邊 <text:s text:c="14"/>1 <text:s text:c="5"/>← 只選3條最便宜的邊</text:p>
            <text:p text:style-name="P46"><text:s text:c="6"/>/ <text:s text:c="4"/>\ <text:s text:c="25"/>/</text:p>
            <text:p text:style-name="P46"><text:s text:c="5"/>B --2-- C <text:s text:c="23"/>B --2-- C</text:p>
            <text:p text:style-name="P46"><text:s text:c="6"/>\ <text:s text:c="4"/>/ <text:s text:c="33"/>\</text:p>
            <text:p text:style-name="P46"><text:s text:c="7"/>5 <text:s text:c="2"/>3 <text:s text:c="35"/>3</text:p>
            <text:p text:style-name="P46"><text:s text:c="8"/>\ / <text:s text:c="37"/>\</text:p>
            <text:p text:style-name="P47"><text:s text:c="9"/>D <text:s text:c="39"/>D</text:p>
            <text:p text:style-name="P45">邊清單：AB=1, AC=4, BC=2, BD=5, CD=3 <text:s text:c="2"/>✅ MST 邊：AB=1, BC=2, CD=3</text:p>
            <text:p text:style-name="P48">總費用 = 1+2+3 = 6（最省！）</text:p>
            <text:p text:style-name="P49">❌ 不選 AC=4：若選了，A─B─C─A 形成迴路，而且費用還比較貴</text:p>
            <text:p text:style-name="P49">❌ 不選 BD=5：若選了，B─C─D─B 形成迴路，同樣多此一舉</text:p>
            <text:p text:style-name="P50">✅ 驗證：4個節點 → V-1 = 3 條邊 <text:s/>✅ <text:s/>無迴路 <text:s/>✅ <text:s text:c="2"/>覆蓋 A,B,C,D <text:s/>✅</text:p>
          </table:table-cell>
        </table:table-row>
      </table:table>
      <text:p text:style-name="P6"/>
      <text:h text:style-name="P10" text:outline-level="2">1-4 為什麼連通圖才有 MST？</text:h>
      <text:p text:style-name="P6"/>
      <text:p text:style-name="P14">假設圖有兩個完全分開的部分（A-B 和 C-D，中間沒有任何邊相連），那麼 A 永遠無法到達 C，也就不可能用任何方式把它們都連起來，MST 就不存在了。這時候只能各自做「最小擴張森林（Minimum Spanning Forest）」。</text:p>
      <text:p text:style-name="P6"/>
      <text:p text:style-name="Standard"/>
      <text:h text:style-name="P9" text:outline-level="1">二、三種 MST 演算法快速比較</text:h>
      <text:p text:style-name="P6"/>
      <text:p text:style-name="P14">求 MST 有三種主流演算法，它們的「切入點」不同：<text:span text:style-name="T16">Prim 從點出發</text:span>、<text:span text:style-name="T17">Kruskal 從邊出發</text:span>、<text:span text:style-name="T18">Sollin 全體同時出發</text:span>。</text:p>
      <text:p text:style-name="P6"/>
      <table:table table:name="表格14" table:style-name="表格14">
        <table:table-column table:style-name="表格14.A" table:number-columns-repeated="5"/>
        <table:table-row table:style-name="表格14.1">
          <table:table-cell table:style-name="表格14.A1" office:value-type="string">
            <text:p text:style-name="P51">比較項目</text:p>
          </table:table-cell>
          <table:table-cell table:style-name="表格14.A1" office:value-type="string">
            <text:p text:style-name="P51">Prim</text:p>
          </table:table-cell>
          <table:table-cell table:style-name="表格14.A1" office:value-type="string">
            <text:p text:style-name="P51">Kruskal</text:p>
          </table:table-cell>
          <table:table-cell table:style-name="表格14.A1" office:value-type="string">
            <text:p text:style-name="P51">Sollin（Borůvka）</text:p>
          </table:table-cell>
          <table:table-cell table:style-name="表格14.A1" office:value-type="string">
            <text:p text:style-name="P51">MST 共同特性</text:p>
          </table:table-cell>
        </table:table-row>
        <table:table-row table:style-name="表格14.1">
          <table:table-cell table:style-name="表格14.A2" office:value-type="string">
            <text:p text:style-name="P52">出發點</text:p>
          </table:table-cell>
          <table:table-cell table:style-name="表格14.A2" office:value-type="string">
            <text:p text:style-name="P53">從「一個節點」開始往外長</text:p>
          </table:table-cell>
          <table:table-cell table:style-name="表格14.A2" office:value-type="string">
            <text:p text:style-name="P54">從「最小邊」開始一條條挑</text:p>
          </table:table-cell>
          <table:table-cell table:style-name="表格14.A2" office:value-type="string">
            <text:p text:style-name="P55">從「所有節點」同時出發</text:p>
          </table:table-cell>
          <table:table-cell table:style-name="表格14.A2" office:value-type="string">
            <text:p text:style-name="P52">V-1 條邊，無 Cycle</text:p>
          </table:table-cell>
        </table:table-row>
        <table:table-row table:style-name="表格14.1">
          <table:table-cell table:style-name="表格14.A3" office:value-type="string">
            <text:p text:style-name="P52">核心工具</text:p>
          </table:table-cell>
          <table:table-cell table:style-name="表格14.A3" office:value-type="string">
            <text:p text:style-name="P52">Min-Heap 或矩陣</text:p>
          </table:table-cell>
          <table:table-cell table:style-name="表格14.A3" office:value-type="string">
            <text:p text:style-name="P52">Union-Find（並查集）</text:p>
          </table:table-cell>
          <table:table-cell table:style-name="表格14.A3" office:value-type="string">
            <text:p text:style-name="P52">Component 清單</text:p>
          </table:table-cell>
          <table:table-cell table:style-name="表格14.A3" office:value-type="string">
            <text:p text:style-name="P52">連通圖才存在</text:p>
          </table:table-cell>
        </table:table-row>
        <table:table-row table:style-name="表格14.1">
          <table:table-cell table:style-name="表格14.A2" office:value-type="string">
            <text:p text:style-name="P56">時間複雜度</text:p>
          </table:table-cell>
          <table:table-cell table:style-name="表格14.A2" office:value-type="string">
            <text:p text:style-name="P56">O(V²) 或 O(E log V)</text:p>
          </table:table-cell>
          <table:table-cell table:style-name="表格14.A2" office:value-type="string">
            <text:p text:style-name="P56">O(E log E)</text:p>
          </table:table-cell>
          <table:table-cell table:style-name="表格14.A2" office:value-type="string">
            <text:p text:style-name="P56">O(E log V)</text:p>
          </table:table-cell>
          <table:table-cell table:style-name="表格14.A2" office:value-type="string">
            <text:p text:style-name="P52">—</text:p>
          </table:table-cell>
        </table:table-row>
        <table:table-row table:style-name="表格14.1">
          <table:table-cell table:style-name="表格14.A3" office:value-type="string">
            <text:p text:style-name="P57">最適圖型</text:p>
          </table:table-cell>
          <table:table-cell table:style-name="表格14.A3" office:value-type="string">
            <text:p text:style-name="P57">稠密圖（邊很多）</text:p>
          </table:table-cell>
          <table:table-cell table:style-name="表格14.A3" office:value-type="string">
            <text:p text:style-name="P57">稀疏圖（邊很少）</text:p>
          </table:table-cell>
          <table:table-cell table:style-name="表格14.A3" office:value-type="string">
            <text:p text:style-name="P57">平行/分散式計算</text:p>
          </table:table-cell>
          <table:table-cell table:style-name="表格14.A3" office:value-type="string">
            <text:p text:style-name="P52">—</text:p>
          </table:table-cell>
        </table:table-row>
        <table:table-row table:style-name="表格14.1">
          <table:table-cell table:style-name="表格14.A2" office:value-type="string">
            <text:p text:style-name="P52">防止 Cycle 方式</text:p>
          </table:table-cell>
          <table:table-cell table:style-name="表格14.A2" office:value-type="string">
            <text:p text:style-name="P52">樹內→樹外規則，天然防止</text:p>
          </table:table-cell>
          <table:table-cell table:style-name="表格14.A2" office:value-type="string">
            <text:p text:style-name="P52">Union-Find 判斷</text:p>
          </table:table-cell>
          <table:table-cell table:style-name="表格14.A2" office:value-type="string">
            <text:p text:style-name="P52">Component 合併後自動排除</text:p>
          </table:table-cell>
          <table:table-cell table:style-name="表格14.A2" office:value-type="string">
            <text:p text:style-name="P52">—</text:p>
          </table:table-cell>
        </table:table-row>
      </table:table>
      <text:p text:style-name="P6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58">🧠 一句話記憶口訣：</text:p>
            <text:p text:style-name="P59">Prim 從「點」長出來 <text:s text:c="2"/>Kruskal 從「邊」挑起來 <text:s text:c="2"/>Sollin 大家同時搶</text:p>
            <text:p text:style-name="P60"><text:span text:style-name="T19">圖很密（邊多）→ Prim</text:span> <text:s/>│ <text:s/><text:span text:style-name="T19">圖很稀（邊少）→ Kruskal </text:span><text:s/>│ <text:s/>要<text:span text:style-name="T19">平行化 → Sollin</text:span></text:p>
          </table:table-cell>
        </table:table-row>
      </table:table>
      <text:p text:style-name="P6"/>
      <text:h text:style-name="P10" text:outline-level="2">2-1 什麼是稠密圖？什麼是稀疏圖？</text:h>
      <text:p text:style-name="P6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61">稠密圖（Dense Graph）： <text:s text:c="13"/>稀疏圖（Sparse Graph）：</text:p>
            <text:p text:style-name="P61">邊數 E 接近最大值 V(V-1)/2 <text:s text:c="10"/>邊數 E 遠小於 V(V-1)/2</text:p>
            <text:p text:style-name="P61">例：5個城市，幾乎每兩個都有路 <text:s text:c="7"/>例：100個城市，只有 110 條路</text:p>
            <text:p text:style-name="P61"><text:s text:c="2"/>A─B─C─D─E <text:s text:c="26"/>A <text:s text:c="9"/>B</text:p>
            <text:p text:style-name="P61"><text:s text:c="2"/>│╲│╱│╲│╱│ <text:s text:c="25"/>│ <text:s text:c="9"/>│</text:p>
            <text:p text:style-name="P61"><text:s text:c="2"/>└─┼─┼─┼─┘ <text:s text:c="2"/>邊非常多 <text:s text:c="13"/>C──D <text:s text:c="7"/>E</text:p>
            <text:p text:style-name="P61">100個節點最多 100×99/2 = 4950 條邊 <text:s text:c="2"/>100個節點可能只有 110 條邊</text:p>
            <text:p text:style-name="P61">→ 適合 Prim（不用排序） <text:s text:c="14"/>→ 適合 Kruskal（排序便宜）</text:p>
          </table:table-cell>
        </table:table-row>
      </table:table>
      <text:p text:style-name="P6"/>
      <text:p text:style-name="Standard"/>
      <text:h text:style-name="P9" text:outline-level="1">三、Prim 演算法 ── 從節點出發，像樹一樣往外長</text:h>
      <text:p text:style-name="P6"/>
      <text:h text:style-name="P10" text:outline-level="2">3-1 核心概念（超新手版解釋）</text:h>
      <text:p text:style-name="P6"/>
      <text:p text:style-name="P14">把 Prim 想像成「蓋電纜網路」的工程：<text:span text:style-name="T10">先把一個城市接上電纜</text:span>（<text:span text:style-name="T20">T = 已連通的城市集合</text:span>），然後<text:span text:style-name="T21">每次往外找</text:span><text:span text:style-name="T22">「接一個新城市費用最低的電纜」</text:span>，一步步延伸，直到所有城市都有電纜為止。</text:p>
      <text:p text:style-name="P6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1">Prim 執行步驟（只有4步！）：</text:p>
            <text:p text:style-name="P8">① <text:span text:style-name="T10">從任意一個節點出發</text:span>，<text:span text:style-name="T20">加入「已選集合 T</text:span>」。</text:p>
            <text:p text:style-name="P8">② <text:span text:style-name="T19">列出所有「T 內 → T 外」的邊</text:span>，這些叫<text:span text:style-name="T15">「候選邊」</text:span>。</text:p>
            <text:p text:style-name="P8">③ <text:span text:style-name="T23">從候選邊中挑出權重最小者</text:span>，<text:span text:style-name="T10">加入 MST</text:span>，並<text:span text:style-name="T20">把新節點加入 T</text:span>。</text:p>
            <text:p text:style-name="P8">④ 重複步驟②③，<text:span text:style-name="T15">直到 T 包含全部 V 個節點</text:span>（選了 <text:span text:style-name="T24">V-1 條邊</text:span>）。</text:p>
            <text:p text:style-name="P62">關鍵：候選邊的規則<text:span text:style-name="T25">「一端在 T 內、另一端在 T 外」天然保證不成環！</text:span></text:p>
          </table:table-cell>
        </table:table-row>
      </table:table>
      <text:p text:style-name="P6"/>
      <text:h text:style-name="P10" text:outline-level="2">3-2 完整圖解範例（4個節點 A, B, C, D）</text:h>
      <text:p text:style-name="P6"/>
      <text:p text:style-name="P14">範例圖：AB=1, AC=4, BC=2, BD=5, CD=3</text:p>
      <text:p text:style-name="P14"><draw:frame draw:style-name="fr1" draw:name="影像1" text:anchor-type="char" svg:x="4.872cm" svg:y="0.042cm" svg:width="5.943cm" svg:height="5.445cm" draw:z-index="0"><draw:image xlink:href="Pictures/1000000100000224000001F643D3A16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63">Step 1：從 A 開始，T = {A}</text:p>
            <text:p text:style-name="P64">T（已連通集合）= {A}</text:p>
            <text:p text:style-name="P64">候選邊（A 往外連的邊）：</text:p>
            <text:p text:style-name="P65"><text:s text:c="2"/>A─B = 1 <text:s text:c="2"/>← 最小！選它！</text:p>
            <text:p text:style-name="P66"><text:s text:c="2"/>A─C = 4</text:p>
            <text:p text:style-name="P64">動作：加入邊 A─B=1，<text:span text:style-name="T20">節點 B 加入 T</text:span></text:p>
            <text:p text:style-name="P67">目前 MST： <text:s/>A │ 1 │ B</text:p>
          </table:table-cell>
        </table:table-row>
      </table:table>
      <text:p text:style-name="P6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63">Step 2：<text:span text:style-name="T26">T = {A, B}</text:span>，繼續往外長</text:p>
            <text:p text:style-name="P64">T（已連通集合）= {A, B}</text:p>
            <text:p text:style-name="P64">候選邊（T 往外連的邊）：</text:p>
            <text:p text:style-name="P68"><text:s text:c="2"/>A─C = 4 <text:s/>（A在T，C在T外）</text:p>
            <text:p text:style-name="P65"><text:s text:c="2"/>B─C = 2 <text:s/>（B在T，C在T外）← 最小！</text:p>
            <text:p text:style-name="P68"><text:s text:c="2"/>B─D = 5 <text:s/>（B在T，D在T外）</text:p>
            <text:p text:style-name="P69"><text:s text:c="2"/>❌ A─B 兩端都在 T，不是候選邊</text:p>
            <text:p text:style-name="P64">動作：加入邊 B─C=2，<text:span text:style-name="T20">節點 C 加入 T</text:span></text:p>
            <text:p text:style-name="P67">目前 MST： <text:s/>A │ 1 │ B ──2── C</text:p>
          </table:table-cell>
        </table:table-row>
      </table:table>
      <text:p text:style-name="P6"/>
      <table:table table:name="表格21" table:style-name="表格21">
        <table:table-column table:style-name="表格21.A"/>
        <text:soft-page-break/>
        <table:table-row table:style-name="表格21.1">
          <table:table-cell table:style-name="表格21.A1" office:value-type="string">
            <text:p text:style-name="P63">Step 3：<text:span text:style-name="T26">T = {A, B, C}</text:span>，繼續往外長</text:p>
            <text:p text:style-name="P64">T（已連通集合）= {A, B, C}</text:p>
            <text:p text:style-name="P64">候選邊（T 往外連的邊）：</text:p>
            <text:p text:style-name="P70"><text:s text:c="2"/>A─C = 4 <text:s/>兩端都在T！不是候選邊</text:p>
            <text:p text:style-name="P70"><text:s text:c="2"/>B─C = 2 <text:s/>兩端都在T！不是候選邊</text:p>
            <text:p text:style-name="P68"><text:s text:c="2"/>B─D = 5 <text:s/>（B在T，D在T外）</text:p>
            <text:p text:style-name="P71"><text:s text:c="2"/>C─D = 3 <text:s/>（C在T，D在T外）← 最小！</text:p>
            <text:p text:style-name="P64">動作：加入邊 C─D=3，<text:span text:style-name="T20">節點 D 加入 T</text:span></text:p>
            <text:p text:style-name="P67">目前 MST： <text:s/>A │ 1 │ B ──2── C │ 3 │ D</text:p>
          </table:table-cell>
        </table:table-row>
      </table:table>
      <text:p text:style-name="P6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72">✅ 完成！<text:span text:style-name="T26">T = {A, B, C, D}</text:span>，所有節點已連通</text:p>
            <text:p text:style-name="P73">MST 邊集合：A─B=1, B─C=2, C─D=3</text:p>
            <text:p text:style-name="P74">總權重：1 + 2 + 3 = 6</text:p>
            <text:p text:style-name="P75">邊數驗證：V-1 = 4-1 = 3 條 <text:s/>✅</text:p>
          </table:table-cell>
        </table:table-row>
      </table:table>
      <text:p text:style-name="P6"/>
      <text:h text:style-name="P10" text:outline-level="2">3-3 為什麼 Prim 天然不產生 Cycle？</text:h>
      <text:p text:style-name="P6"/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63">【規則】：<text:span text:style-name="T5">候選邊必須「一端在T、一端不在T」</text:span></text:p>
            <text:p text:style-name="P76">T = {A, B, C}：</text:p>
            <text:p text:style-name="P46">✅ 合法候選邊： <text:s text:c="13"/>❌ 自動排除（兩端都在T）：</text:p>
            <text:p text:style-name="P46"><text:s text:c="2"/>C → D <text:s/>一端在T外，OK <text:s text:c="7"/>A ─ B <text:s/>兩端都在T，若加 → 成環！</text:p>
            <text:p text:style-name="P48"><text:s text:c="2"/>B → D <text:s/>一端在T外，OK <text:s text:c="7"/>B ─ C <text:s/>兩端都在T，若加 → 成環！</text:p>
            <text:p text:style-name="P77">結論：<text:span text:style-name="T27">Prim 靠「T內→T外」規則</text:span>，完全不需要 Union-Find，也不用額外檢查環，<text:span text:style-name="T27">天然保證 MST 合法！</text:span></text:p>
          </table:table-cell>
        </table:table-row>
      </table:table>
      <text:p text:style-name="P6"/>
      <text:h text:style-name="P10" text:outline-level="2">3-4 Prim 程式實作（C++）</text:h>
      <text:p text:style-name="P6"/>
      <text:p text:style-name="P14">以下是 Prim 演算法的 C++ 實作，使用 <text:span text:style-name="T8">STL 的</text:span> <text:span text:style-name="T28">priority_queue（最小堆積）</text:span><text:span text:style-name="T10">讓效率更好</text:span>：</text:p>
      <text:p text:style-name="P6"/>
      <table:table table:name="新增說明框" table:style-name="新增說明框">
        <table:table-column table:style-name="新增說明框.A"/>
        <table:table-row table:style-name="新增說明框.1">
          <table:table-cell table:style-name="新增說明框.A1" office:value-type="string">
            <text:p text:style-name="P7">pair&lt;vector&lt;tuple&lt;int,int,int&gt;&gt;, int&gt; 是什麼？</text:p>
            <text:p text:style-name="P8"/>
            <text:p text:style-name="P8">這不是圖，而是函式的「回傳型別」，意思是同時回傳兩個東西：</text:p>
            <text:p text:style-name="P8"/>
            <text:p text:style-name="P40"><text:span text:style-name="T11">pair&lt;A, B&gt;</text:span> = <text:span text:style-name="T29">一個容器</text:span>，裡面裝<text:span text:style-name="T30">兩個不同型別的值</text:span></text:p>
            <text:p text:style-name="P8"/>
            <text:p text:style-name="P78">第一個：vector&lt;tuple&lt;int,int,int&gt;&gt;</text:p>
            <text:p text:style-name="P8">→ MST 選到的邊清單，<text:span text:style-name="T20">每條邊</text:span><text:span text:style-name="T15">是一個 tuple(費用, 起點, 終點)</text:span></text:p>
            <text:p text:style-name="P8"/>
            <text:p text:style-name="P78">第二個：int</text:p>
            <text:p text:style-name="P8">→ <text:span text:style-name="T31">MST 的總費用（一個整數）</text:span></text:p>
            <text:p text:style-name="P8"/>
            <text:p text:style-name="P35">使用時用 <text:span text:style-name="T10">auto</text:span> [<text:span text:style-name="T9">edges, total</text:span>] = <text:span text:style-name="T32">prim(g, 0)</text:span>; 一次拆出兩個值</text:p>
            <text:p text:style-name="P79">edges = 邊清單 total = 總費用</text:p>
          </table:table-cell>
        </table:table-row>
      </table:table>
      <text:p text:style-name="P8"/>
      <table:table table:name="新增說明框_1" table:style-name="新增說明框_5f_1">
        <table:table-column table:style-name="新增說明框_5f_1.A"/>
        <table:table-row table:style-name="新增說明框_5f_1.1">
          <table:table-cell table:style-name="新增說明框_5f_1.A1" office:value-type="string">
            <text:p text:style-name="P7">Graph（圖）本人長這樣</text:p>
            <text:p text:style-name="P8"/>
            <text:p text:style-name="P80"><text:soft-page-break/>using Graph = vector&lt;vector&lt;pair&lt;int,int&gt;&gt;&gt;;</text:p>
            <text:p text:style-name="P8"/>
            <text:p text:style-name="P8">一層一層拆開來讀：</text:p>
            <text:p text:style-name="P35">pair&lt;int,int&gt; = 一條邊，存 {費用, 目標節點}</text:p>
            <text:p text:style-name="P35">vector&lt;pair&lt;int,int&gt;&gt; = <text:span text:style-name="T33">某個節點</text:span>的所有出邊（鄰邊清單）</text:p>
            <text:p text:style-name="P35">vector&lt;vector&lt;pair&lt;int,int&gt;&gt;&gt; = 整張圖，每個節點各有一份鄰邊清單</text:p>
            <text:p text:style-name="P8"/>
            <text:p text:style-name="P8">以本章範例（A=0, B=1, C=2, D=3）為例，建好圖後長這樣：</text:p>
            <text:p text:style-name="P8"/>
            <text:p text:style-name="P80">g[0] = { {1,1}, {4,2} } // A 連到 B(費用1)、C(費用4)</text:p>
            <text:p text:style-name="P80">g[1] = { {1,0}, {2,2}, {5,3} } // B 連到 A(1)、C(2)、D(5)</text:p>
            <text:p text:style-name="P80">g[2] = { {4,0}, {2,1}, {3,3} } // C 連到 A(4)、B(2)、D(3)</text:p>
            <text:p text:style-name="P80">g[3] = { {5,1}, {3,2} } // D 連到 B(5)、C(3)</text:p>
            <text:p text:style-name="P8"/>
            <text:p text:style-name="P43">g[i] 就是「從節點 i 出發，可以走到哪裡、費用是多少」的清單。</text:p>
          </table:table-cell>
        </table:table-row>
      </table:table>
      <text:p text:style-name="P8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81">// ── 需要的標頭檔 ────────────────────────────────────────────</text:p>
            <text:p text:style-name="P80">#include &lt;iostream&gt; // cout：在螢幕印出結果</text:p>
            <text:p text:style-name="P80">#include &lt;vector&gt; // vector：動態陣列，用來存圖的邊</text:p>
            <text:p text:style-name="P80">#include &lt;queue&gt; // priority_queue：min-heap，用來每次找最小邊</text:p>
            <text:p text:style-name="P80">#include &lt;tuple&gt; // tuple：一次存多個值，例如 (費用, 節點A, 節點B)</text:p>
            <text:p text:style-name="P80">#include &lt;climits&gt; // INT_MAX：表示「無限大」的整數</text:p>
            <text:p text:style-name="P80">using namespace std; // 省去每次寫 std:: 的麻煩</text:p>
            <text:p text:style-name="P82"/>
            <text:p text:style-name="P81">// ── 定義「圖」的資料型別 ────────────────────────────────────</text:p>
            <text:p text:style-name="P83">// pair&lt;int,int&gt;：一條邊，存 {費用, 目標節點}</text:p>
            <text:p text:style-name="P83">// vector&lt;pair&lt;int,int&gt;&gt;：某個節點的所有出邊</text:p>
            <text:p text:style-name="P83">// Graph：整張圖，graph[u] 存從 u 出發的所有邊</text:p>
            <text:p text:style-name="P80">using Graph = vector&lt;vector&lt;pair&lt;int,int&gt;&gt;&gt;;</text:p>
            <text:p text:style-name="P82"/>
            <text:p text:style-name="P81">// ── Prim 主函式 ─────────────────────────────────────────────</text:p>
            <text:p text:style-name="P83">// 輸入：graph（整張圖）、start（從哪個節點出發，預設節點0）</text:p>
            <text:p text:style-name="P83">// 輸出：MST 的邊清單 + 總權重</text:p>
            <text:p text:style-name="P80">pair&lt;vector&lt;tuple&lt;int,int,int&gt;&gt;, int&gt;</text:p>
            <text:p text:style-name="P80">prim(const Graph&amp; graph, int start = 0) {</text:p>
            <text:p text:style-name="P82"/>
            <text:p text:style-name="P80">int n = graph.size(); // 節點總數，例如4個城市 n=4</text:p>
            <text:p text:style-name="P82"/>
            <text:p text:style-name="P83">// inTree[i] = true 表示節點 i 已加入 MST（已接上電纜）</text:p>
            <text:p text:style-name="P83">// 一開始所有城市都還沒接上，全部 false</text:p>
            <text:p text:style-name="P80">vector&lt;bool&gt; inTree(n, false);</text:p>
            <text:p text:style-name="P82"/>
            <text:p text:style-name="P83">// mstEdges：記錄最終 MST 選了哪些邊</text:p>
            <text:p text:style-name="P83">// 每條邊存成 (費用, 起點, 終點)</text:p>
            <text:p text:style-name="P80">vector&lt;tuple&lt;int,int,int&gt;&gt; mstEdges;</text:p>
            <text:p text:style-name="P80">int total = 0; // MST 的總費用（一開始是0）</text:p>
            <text:p text:style-name="P82"/>
            <text:p text:style-name="P81">// ── Min-Heap（最小堆積）────────────────────────────────</text:p>
            <text:p text:style-name="P83">// priority_queue 預設是「最大堆」（最大值在頂端）</text:p>
            <text:p text:style-name="P83">// 加上 greater&lt;&gt; 讓它變成「最小堆」（最小值在頂端）</text:p>
            <text:p text:style-name="P83">// 存的格式：(費用, 目標節點, 來源節點)</text:p>
            <text:p text:style-name="P83">// greater&lt;tuple&lt;...&gt;&gt; 讓 priority_queue 按費用由小到大排</text:p>
            <text:p text:style-name="P80">priority_queue&lt;</text:p>
            <text:p text:style-name="P80">tuple&lt;int,int,int&gt;,</text:p>
            <text:p text:style-name="P80">vector&lt;tuple&lt;int,int,int&gt;&gt;,</text:p>
            <text:p text:style-name="P80">greater&lt;tuple&lt;int,int,int&gt;&gt; // 這行讓它變成 min-heap</text:p>
            <text:p text:style-name="P80">&gt; pq;</text:p>
            <text:p text:style-name="P82"/>
            <text:p text:style-name="P83"><text:soft-page-break/>// 把起點放進 heap，費用=0（虛擬邊，只是為了啟動迴圈）</text:p>
            <text:p text:style-name="P83">// -1 表示「沒有來源節點」</text:p>
            <text:p text:style-name="P80">pq.push({0, start, -1});</text:p>
            <text:p text:style-name="P82"/>
            <text:p text:style-name="P81">// ── 主迴圈：不斷取出最小費用的候選邊 ──────────────────</text:p>
            <text:p text:style-name="P83">// 條件：heap 不為空 且 MST 邊數還不到 n-1</text:p>
            <text:p text:style-name="P80">while (!pq.empty() &amp;&amp; (int)mstEdges.size() &lt; n - 1) {</text:p>
            <text:p text:style-name="P82"/>
            <text:p text:style-name="P83">// 從 heap 頂端取出費用最小的邊</text:p>
            <text:p text:style-name="P83">// auto [w, u, prev]：C++17 結構化綁定，一次拆開 tuple</text:p>
            <text:p text:style-name="P83">// w = 費用, u = 目標節點, prev = 來源節點</text:p>
            <text:p text:style-name="P80">auto [w, u, prev] = pq.top(); pq.pop();</text:p>
            <text:p text:style-name="P82"/>
            <text:p text:style-name="P83">// 如果 u 已經在 MST 裡，跳過（避免重複加入）</text:p>
            <text:p text:style-name="P80">if (inTree[u]) continue;</text:p>
            <text:p text:style-name="P82"/>
            <text:p text:style-name="P80">inTree[u] = true; // 把 u 標記為「已加入 MST」</text:p>
            <text:p text:style-name="P82"/>
            <text:p text:style-name="P83">// 如果不是起點的虛擬邊（prev != -1），就記錄這條邊</text:p>
            <text:p text:style-name="P80">if (prev != -1) {</text:p>
            <text:p text:style-name="P80">mstEdges.push_back({w, prev, u}); // 加入 MST</text:p>
            <text:p text:style-name="P80">total += w; // 累加費用</text:p>
            <text:p text:style-name="P80">}</text:p>
            <text:p text:style-name="P82"/>
            <text:p text:style-name="P83">// 把 u 的所有鄰邊加進 heap（只加另一端還不在 MST 的）</text:p>
            <text:p text:style-name="P83">// auto [ew, v]：ew=邊的費用, v=鄰居節點</text:p>
            <text:p text:style-name="P80">for (auto [ew, v] : graph[u])</text:p>
            <text:p text:style-name="P80">if (!inTree[v])</text:p>
            <text:p text:style-name="P80">pq.push({ew, v, u}); // 候選邊：從u到v費用ew</text:p>
            <text:p text:style-name="P80">}</text:p>
            <text:p text:style-name="P82"/>
            <text:p text:style-name="P80">return {mstEdges, total};</text:p>
            <text:p text:style-name="P80">}</text:p>
            <text:p text:style-name="P82"/>
            <text:p text:style-name="P81">// ── 測試程式 ─────────────────────────────────────────────────</text:p>
            <text:p text:style-name="P83">// 建圖：A=0, B=1, C=2, D=3</text:p>
            <text:p text:style-name="P83">// 邊：AB=1, AC=4, BC=2, BD=5, CD=3</text:p>
            <text:p text:style-name="P83">// 預期 MST：AB=1 + BC=2 + CD=3 = 6</text:p>
            <text:p text:style-name="P80">int main() {</text:p>
            <text:p text:style-name="P80">int n = 4; // 4個節點</text:p>
            <text:p text:style-name="P80">Graph g(n); // g[0]~g[3] 各自是空的鄰邊清單</text:p>
            <text:p text:style-name="P82"/>
            <text:p text:style-name="P83">// addEdge：加一條雙向邊（無向圖，兩端都要加）</text:p>
            <text:p text:style-name="P80">auto addEdge = [&amp;](int u, int v, int w) {</text:p>
            <text:p text:style-name="P80">g[u].push_back({w, v}); // u→v 費用w</text:p>
            <text:p text:style-name="P80">g[v].push_back({w, u}); // v→u 費用w（無向）</text:p>
            <text:p text:style-name="P80">};</text:p>
            <text:p text:style-name="P82"/>
            <text:p text:style-name="P80">addEdge(0, 1, 1); // A─B = 1</text:p>
            <text:p text:style-name="P80">addEdge(0, 2, 4); // A─C = 4</text:p>
            <text:p text:style-name="P80">addEdge(1, 2, 2); // B─C = 2</text:p>
            <text:p text:style-name="P80">addEdge(1, 3, 5); // B─D = 5</text:p>
            <text:p text:style-name="P80">addEdge(2, 3, 3); // C─D = 3</text:p>
            <text:p text:style-name="P82"/>
            <text:p text:style-name="P80">auto [edges, total] = prim(g, 0); // 從節點0(A)出發</text:p>
            <text:p text:style-name="P82"/>
            <text:p text:style-name="P80">cout &lt;&lt; "MST 邊：\n";</text:p>
            <text:p text:style-name="P80">for (auto [w, u, v] : edges)</text:p>
            <text:p text:style-name="P80">cout &lt;&lt; u &lt;&lt; "-" &lt;&lt; v &lt;&lt; " 費用=" &lt;&lt; w &lt;&lt; "\n";</text:p>
            <text:p text:style-name="P80">cout &lt;&lt; "總權重：" &lt;&lt; total &lt;&lt; "\n"; // 應該是 6</text:p>
            <text:p text:style-name="P80">return 0;</text:p>
            <text:p text:style-name="P80"><text:soft-page-break/>}</text:p>
          </table:table-cell>
        </table:table-row>
      </table:table>
      <text:p text:style-name="P6"/>
      <text:h text:style-name="P10" text:outline-level="2">3-5 Prim 時間複雜度</text:h>
      <text:p text:style-name="P6"/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row table:style-name="表格25.1">
          <table:table-cell table:style-name="表格25.A1" office:value-type="string">
            <text:p text:style-name="P84">版本</text:p>
          </table:table-cell>
          <table:table-cell table:style-name="表格25.A1" office:value-type="string">
            <text:p text:style-name="P84">資料結構</text:p>
          </table:table-cell>
          <table:table-cell table:style-name="表格25.A1" office:value-type="string">
            <text:p text:style-name="P84">時間複雜度</text:p>
          </table:table-cell>
          <table:table-cell table:style-name="表格25.A1" office:value-type="string">
            <text:p text:style-name="P84">什麼時候用？</text:p>
          </table:table-cell>
        </table:table-row>
        <table:table-row table:style-name="表格25.1">
          <table:table-cell table:style-name="表格25.A2" office:value-type="string">
            <text:p text:style-name="P85">基本版</text:p>
          </table:table-cell>
          <table:table-cell table:style-name="表格25.A2" office:value-type="string">
            <text:p text:style-name="P85">鄰接矩陣</text:p>
          </table:table-cell>
          <table:table-cell table:style-name="表格25.A2" office:value-type="string">
            <text:p text:style-name="P86">O(V²)</text:p>
          </table:table-cell>
          <table:table-cell table:style-name="表格25.A2" office:value-type="string">
            <text:p text:style-name="P85">稠密圖（邊數接近 V²）時，這個反而最省</text:p>
          </table:table-cell>
        </table:table-row>
        <table:table-row table:style-name="表格25.1">
          <table:table-cell table:style-name="表格25.A3" office:value-type="string">
            <text:p text:style-name="P85">最佳化版</text:p>
          </table:table-cell>
          <table:table-cell table:style-name="表格25.A3" office:value-type="string">
            <text:p text:style-name="P85">Min-Heap（優先佇列）</text:p>
          </table:table-cell>
          <table:table-cell table:style-name="表格25.A3" office:value-type="string">
            <text:p text:style-name="P87">O(E log V)</text:p>
          </table:table-cell>
          <table:table-cell table:style-name="表格25.A3" office:value-type="string">
            <text:p text:style-name="P85">一般圖，E 不太大時使用</text:p>
          </table:table-cell>
        </table:table-row>
      </table:table>
      <text:p text:style-name="P6"/>
      <table:table table:name="新增表格62" table:style-name="新增表格62">
        <table:table-column table:style-name="新增表格62.A"/>
        <table:table-row table:style-name="新增表格62.1">
          <table:table-cell table:style-name="新增表格62.A1" office:value-type="string">
            <text:p text:style-name="P11">【版本一】鄰接矩陣版 → O(V²)</text:p>
            <text:p text:style-name="P11">【版本二】Min-Heap 版 → O(E log V)</text:p>
            <text:p text:style-name="P8">稠密圖（E ≈ V²）用版本一更省；稀疏圖用版本二更快。</text:p>
          </table:table-cell>
        </table:table-row>
      </table:table>
      <text:p text:style-name="P6"/>
      <table:table table:name="新增表格63" table:style-name="新增表格63">
        <table:table-column table:style-name="新增表格63.A"/>
        <table:table-row table:style-name="新增表格63.1">
          <table:table-cell table:style-name="新增表格63.A1" office:value-type="string">
            <text:p text:style-name="P7">版本一：鄰接矩陣版 → O(V²)</text:p>
            <text:p text:style-name="P8"/>
            <text:p text:style-name="P8">Prim 的外層迴圈跑 V 次（把 V 個節點一一加入集合 T）。</text:p>
            <text:p text:style-name="P8">每一次迭代做兩件事：</text:p>
            <text:p text:style-name="P8">① <text:span text:style-name="T34">從所有</text:span><text:span text:style-name="T3">「T 外節點」找距離 T 最近的節點 </text:span>→ 掃描整行矩陣 <text:span text:style-name="T15">O(V)</text:span></text:p>
            <text:p text:style-name="P8">② <text:span text:style-name="T35">把新節點加入 T</text:span>，<text:span text:style-name="T9">更新其他節點到 T 的最短距離</text:span> → 再掃一整行 <text:span text:style-name="T15">O(V)</text:span></text:p>
            <text:p text:style-name="P8"/>
            <text:p text:style-name="P23">→ <text:span text:style-name="T11">外層 V 次 × 每次 O(V)</text:span> = <text:span text:style-name="T36">O(V × V)</text:span> = O(V²)</text:p>
            <text:p text:style-name="P8"/>
            <text:p text:style-name="P25">為什麼每次掃描是 O(V)？</text:p>
            <text:p text:style-name="P8">鄰接矩陣是 V×V 的表格。<text:span text:style-name="T15">要找「最近節點」或「更新距離」，</text:span></text:p>
            <text:p text:style-name="P8"><text:span text:style-name="T15">都必須逐格讀整行</text:span>，共 V 格 → 每次 O(V)。</text:p>
            <text:p text:style-name="P8"/>
            <text:p text:style-name="P25">什麼時候 <text:span text:style-name="T11">O(V²) 反而比較好？</text:span><text:span text:style-name="T37">稠密圖（E ≈ V²）</text:span><text:span text:style-name="T38">時；</text:span></text:p>
            <text:p text:style-name="P88">O(E log V) ≈ O(V² log V)，<text:span text:style-name="T39">比 O(V²) 還慢！→ </text:span><text:span text:style-name="T40">稠密圖請用矩陣版</text:span><text:span text:style-name="T39">。</text:span></text:p>
          </table:table-cell>
        </table:table-row>
      </table:table>
      <text:p text:style-name="P6"/>
      <table:table table:name="新增表格64" table:style-name="新增表格64">
        <table:table-column table:style-name="新增表格64.A"/>
        <table:table-column table:style-name="新增表格64.B"/>
        <table:table-column table:style-name="新增表格64.C"/>
        <table:table-column table:style-name="新增表格64.D"/>
        <table:table-row table:style-name="新增表格64.1">
          <table:table-cell table:style-name="新增表格64.A1" office:value-type="string">
            <text:p text:style-name="P84">操作</text:p>
          </table:table-cell>
          <table:table-cell table:style-name="新增表格64.A1" office:value-type="string">
            <text:p text:style-name="P84">執行次數</text:p>
          </table:table-cell>
          <table:table-cell table:style-name="新增表格64.A1" office:value-type="string">
            <text:p text:style-name="P84">每次花費</text:p>
          </table:table-cell>
          <table:table-cell table:style-name="新增表格64.A1" office:value-type="string">
            <text:p text:style-name="P84">小計</text:p>
          </table:table-cell>
        </table:table-row>
        <table:table-row table:style-name="新增表格64.1">
          <table:table-cell table:style-name="新增表格64.A2" office:value-type="string">
            <text:p text:style-name="P8">找最小距離節點</text:p>
          </table:table-cell>
          <table:table-cell table:style-name="新增表格64.A2" office:value-type="string">
            <text:p text:style-name="P8">V 次（<text:span text:style-name="T41">每個節點加入一次</text:span>）</text:p>
          </table:table-cell>
          <table:table-cell table:style-name="新增表格64.A2" office:value-type="string">
            <text:p text:style-name="P8">O(V)（<text:span text:style-name="T42">掃全部 T 外節點</text:span>）</text:p>
          </table:table-cell>
          <table:table-cell table:style-name="新增表格64.A2" office:value-type="string">
            <text:p text:style-name="P8">V × V = O(V²)</text:p>
          </table:table-cell>
        </table:table-row>
        <table:table-row table:style-name="新增表格64.1">
          <table:table-cell table:style-name="新增表格64.A3" office:value-type="string">
            <text:p text:style-name="P8">更新鄰居距離</text:p>
          </table:table-cell>
          <table:table-cell table:style-name="新增表格64.A3" office:value-type="string">
            <text:p text:style-name="P8">V 次</text:p>
          </table:table-cell>
          <table:table-cell table:style-name="新增表格64.A3" office:value-type="string">
            <text:p text:style-name="P8">O(V)（<text:span text:style-name="T43">掃整行矩陣</text:span>）</text:p>
          </table:table-cell>
          <table:table-cell table:style-name="新增表格64.A3" office:value-type="string">
            <text:p text:style-name="P8">V × V = O(V²)</text:p>
          </table:table-cell>
        </table:table-row>
        <table:table-row table:style-name="新增表格64.1">
          <table:table-cell table:style-name="新增表格64.A4" office:value-type="string">
            <text:p text:style-name="P33">總計</text:p>
          </table:table-cell>
          <table:table-cell table:style-name="新增表格64.A4" office:value-type="string">
            <text:p text:style-name="P33">—</text:p>
          </table:table-cell>
          <table:table-cell table:style-name="新增表格64.A4" office:value-type="string">
            <text:p text:style-name="P33">—</text:p>
          </table:table-cell>
          <table:table-cell table:style-name="新增表格64.A4" office:value-type="string">
            <text:p text:style-name="P33">O(V²)</text:p>
          </table:table-cell>
        </table:table-row>
      </table:table>
      <text:p text:style-name="P6"/>
      <text:p text:style-name="P8"><text:soft-page-break/><draw:frame draw:style-name="fr2" draw:name="影像2" text:anchor-type="as-char" svg:y="0cm" svg:width="16cm" svg:height="12.471cm" draw:z-index="1"><draw:image xlink:href="Pictures/1000000000000550000003C07CAFE178.png" xlink:type="simple" xlink:show="embed" xlink:actuate="onLoad" draw:mime-type="image/png"/></draw:frame></text:p>
      <text:p text:style-name="P8"/>
      <table:table table:name="新增表格65" table:style-name="新增表格65">
        <table:table-column table:style-name="新增表格65.A"/>
        <table:table-row table:style-name="新增表格65.1">
          <table:table-cell table:style-name="新增表格65.A1" office:value-type="string">
            <text:p text:style-name="P7">版本二：<text:span text:style-name="T44">Min-Heap</text:span><text:span text:style-name="T45">（最小堆積）版 → O(E log V)</text:span></text:p>
            <text:p text:style-name="P8"/>
            <text:p text:style-name="P36">先搞懂 Heap 在幹嘛</text:p>
            <text:p text:style-name="P8"/>
            <text:p text:style-name="P8">想像你有一堆候選邊，每次都要找「最便宜的那條」。</text:p>
            <text:p text:style-name="P8">如果用普通 list：每次都要從頭掃到尾 → 很慢。</text:p>
            <text:p text:style-name="P89">改用 Min-Heap：</text:p>
            <text:p text:style-name="P8"><text:span text:style-name="T46">最小值永遠自動浮到頂端，直接拿走就好</text:span>。</text:p>
            <text:p text:style-name="P8"><text:span text:style-name="T47">放進去一個元素、或拿出頂端元素，只需要 log N 的時間</text:span>。</text:p>
            <text:p text:style-name="P43">（<text:span text:style-name="T48">N = Heap 裡目前有幾個元素</text:span>）</text:p>
            <text:p text:style-name="P8"/>
            <text:p text:style-name="P36">Lazy Prim 怎麼用這個 Heap？</text:p>
            <text:p text:style-name="P8"/>
            <text:p text:style-name="P8"><text:span text:style-name="T10">每當有新節點加入 T</text:span>，<text:span text:style-name="T49">就把它</text:span><text:span text:style-name="T50">所有鄰邊</text:span><text:span text:style-name="T49">都 push 進 Heap</text:span>（<text:span text:style-name="T15">不論對方是否已在 T 內</text:span>）。</text:p>
            <text:p text:style-name="P8">因此<text:span text:style-name="T51">同一個節點可能被多條邊重複放入 Heap</text:span>，Heap 中最多累積 O(E) 個元素。</text:p>
            <text:p text:style-name="P43"><text:span text:style-name="T52">這就是「Lazy（懶惰）」</text:span>：<text:span text:style-name="T53">不先整理，先全丟進去</text:span>，<text:span text:style-name="T54">拿出來時再判斷有沒有用</text:span>。</text:p>
            <text:p text:style-name="P8"/>
            <text:p text:style-name="P36">為什麼<text:span text:style-name="T45">總花費是 O(E log V)</text:span>？── 一步一步算</text:p>
            <text:p text:style-name="P8"/>
            <text:p text:style-name="P40">問：Heap 總共被 push 幾次？</text:p>
            <text:p text:style-name="P8">答：<text:span text:style-name="T55">每條邊最多被放入一次，共 E 條邊</text:span> → 總 push 次數 = E 次。</text:p>
            <text:p text:style-name="P8"/>
            <text:p text:style-name="P40">問：Heap 總共被 pop 幾次？</text:p>
            <text:p text:style-name="P8">答：<text:span text:style-name="T54">放進去的東西最終都會被拿出來 → 總 pop 次數 = E 次</text:span>。</text:p>
            <text:p text:style-name="P8"><text:soft-page-break/></text:p>
            <text:p text:style-name="P40">問：一次 push 或 pop 要花多久？</text:p>
            <text:p text:style-name="P8">答：Heap 是一棵樹，Heap 裡有幾個元素，樹就有幾個節點。</text:p>
            <text:p text:style-name="P8"><text:span text:style-name="T52">放入或拿走一個元素，最多只需要從根走到葉子（或反過來），也就是走「樹高」次</text:span>。</text:p>
            <text:p text:style-name="P8"><text:span text:style-name="T56">樹高 = log（節點數）= log E</text:span>。</text:p>
            <text:p text:style-name="P90">(註：<text:span text:style-name="T57">因為 Lazy Prim 的做法是：每條邊最多被 push 進 Heap 一次，圖裡總共有 E 條邊</text:span>，所以 Heap 裡最多同時存在 E 個元素；也就是說：<text:span text:style-name="T52">節點數（Heap 的大小）= 最多 E 個</text:span>)</text:p>
            <text:p text:style-name="P8">所以：一次 push 或 pop = O(log E)。</text:p>
            <text:p text:style-name="P8"/>
            <text:p text:style-name="P40">問：<text:span text:style-name="T58">log E 為什麼可以換成 log V？</text:span></text:p>
            <text:p text:style-name="P8">答：<text:span text:style-name="T59">圖裡邊數 E 最多是 V² 左右（每兩個節點之間各一條邊）</text:span>。</text:p>
            <text:p text:style-name="P8">所以 <text:span text:style-name="T56">log E ≤ log V² = 2 × log V</text:span>。</text:p>
            <text:p text:style-name="P8">2 × log V 在大 O 符號裡，常數 2 可以去掉，就是 O(log V)。</text:p>
            <text:p text:style-name="P43"><text:span text:style-name="T60">∴ O(log E) = O(log V)</text:span>，兩種寫法是同一個等級，考試都對。</text:p>
            <text:p text:style-name="P8"/>
            <text:p text:style-name="P40">問：加起來總共多少？</text:p>
            <text:p text:style-name="P8">答：</text:p>
            <text:p text:style-name="P35"><text:span text:style-name="T52">push E 次，每次 O(log V)</text:span> → E × log V = O(E log V)</text:p>
            <text:p text:style-name="P35"><text:span text:style-name="T52">pop E 次，每次 O(log V)</text:span> → E × log V = O(E log V)</text:p>
            <text:p text:style-name="P35">兩個加起來：O(E log V) + O(E log V) = O(2E log V)</text:p>
            <text:p text:style-name="P35">大 O 忽略常數倍，O(2E log V) = O(E log V)。</text:p>
            <text:p text:style-name="P8"/>
            <text:p text:style-name="P43">就像<text:span text:style-name="T54">「走 2 公里」和「走 1 公里」在量級上是同一個等級</text:span>，</text:p>
            <text:p text:style-name="P43">Big-O 只看「大概多少量級」，不管前面的常數係數。</text:p>
          </table:table-cell>
        </table:table-row>
      </table:table>
      <text:p text:style-name="P6"/>
      <table:table table:name="新增表格66" table:style-name="新增表格66">
        <table:table-column table:style-name="新增表格66.A"/>
        <table:table-column table:style-name="新增表格66.B"/>
        <table:table-column table:style-name="新增表格66.C"/>
        <table:table-column table:style-name="新增表格66.D"/>
        <table:table-row table:style-name="新增表格66.1">
          <table:table-cell table:style-name="新增表格66.A1" office:value-type="string">
            <text:p text:style-name="P84">操作</text:p>
          </table:table-cell>
          <table:table-cell table:style-name="新增表格66.A1" office:value-type="string">
            <text:p text:style-name="P84">發生幾次</text:p>
          </table:table-cell>
          <table:table-cell table:style-name="新增表格66.A1" office:value-type="string">
            <text:p text:style-name="P84">每次花多久</text:p>
          </table:table-cell>
          <table:table-cell table:style-name="新增表格66.A1" office:value-type="string">
            <text:p text:style-name="P84">小計</text:p>
          </table:table-cell>
        </table:table-row>
        <table:table-row table:style-name="新增表格66.1">
          <table:table-cell table:style-name="新增表格66.A2" office:value-type="string">
            <text:p text:style-name="P8">push 進 Heap</text:p>
          </table:table-cell>
          <table:table-cell table:style-name="新增表格66.A2" office:value-type="string">
            <text:p text:style-name="P91">E 次（每條邊一次）</text:p>
          </table:table-cell>
          <table:table-cell table:style-name="新增表格66.A2" office:value-type="string">
            <text:p text:style-name="P8">O(log E) = O(log V)</text:p>
          </table:table-cell>
          <table:table-cell table:style-name="新增表格66.A2" office:value-type="string">
            <text:p text:style-name="P8">O(E log V)</text:p>
          </table:table-cell>
        </table:table-row>
        <table:table-row table:style-name="新增表格66.1">
          <table:table-cell table:style-name="新增表格66.A3" office:value-type="string">
            <text:p text:style-name="P8">pop 出 Heap</text:p>
          </table:table-cell>
          <table:table-cell table:style-name="新增表格66.A3" office:value-type="string">
            <text:p text:style-name="P92">E 次（放幾次拿幾次）</text:p>
          </table:table-cell>
          <table:table-cell table:style-name="新增表格66.A3" office:value-type="string">
            <text:p text:style-name="P8">O(log E) = O(log V)</text:p>
          </table:table-cell>
          <table:table-cell table:style-name="新增表格66.A3" office:value-type="string">
            <text:p text:style-name="P8">O(E log V)</text:p>
          </table:table-cell>
        </table:table-row>
        <table:table-row table:style-name="新增表格66.1">
          <table:table-cell table:style-name="新增表格66.A2" office:value-type="string">
            <text:p text:style-name="P8">節點加入 T</text:p>
          </table:table-cell>
          <table:table-cell table:style-name="新增表格66.A2" office:value-type="string">
            <text:p text:style-name="P8">V 次</text:p>
          </table:table-cell>
          <table:table-cell table:style-name="新增表格66.A2" office:value-type="string">
            <text:p text:style-name="P8">O(1)（直接標記）</text:p>
          </table:table-cell>
          <table:table-cell table:style-name="新增表格66.A2" office:value-type="string">
            <text:p text:style-name="P8">O(V)，可忽略</text:p>
          </table:table-cell>
        </table:table-row>
        <table:table-row table:style-name="新增表格66.1">
          <table:table-cell table:style-name="新增表格66.A3" office:value-type="string">
            <text:p text:style-name="P24">總計</text:p>
          </table:table-cell>
          <table:table-cell table:style-name="新增表格66.A3" office:value-type="string">
            <text:p text:style-name="P24">—</text:p>
          </table:table-cell>
          <table:table-cell table:style-name="新增表格66.A3" office:value-type="string">
            <text:p text:style-name="P24">—</text:p>
          </table:table-cell>
          <table:table-cell table:style-name="新增表格66.A3" office:value-type="string">
            <text:p text:style-name="P93">O(E log V) + O(E log V) = O(E log V)</text:p>
          </table:table-cell>
        </table:table-row>
      </table:table>
      <text:p text:style-name="P6"/>
      <table:table table:name="新增HeapSummary" table:style-name="新增HeapSummary">
        <table:table-column table:style-name="新增HeapSummary.A"/>
        <table:table-row table:style-name="新增HeapSummary.1">
          <table:table-cell table:style-name="新增HeapSummary.A1" office:value-type="string">
            <text:p text:style-name="P24">✅ 考試最簡單記法</text:p>
            <text:p text:style-name="P8"/>
            <text:p text:style-name="P8"><text:span text:style-name="T52">每條邊進出 Heap 各一次</text:span> = <text:span text:style-name="T61">O(E) 次操作</text:span></text:p>
            <text:p text:style-name="P8"><text:span text:style-name="T56">Heap 大小最多 E </text:span>→ 每次操作 <text:span text:style-name="T62">O(log E) = O(log V)</text:span></text:p>
            <text:p text:style-name="P40">→ 總計 O(E log V)</text:p>
            <text:p text:style-name="P8"/>
            <text:p text:style-name="P43">O(E log V) 和 O(E log E) 是同一等級，兩種寫法考試都被接受。</text:p>
          </table:table-cell>
        </table:table-row>
      </table:table>
      <text:p text:style-name="P8"/>
      <text:p text:style-name="P8"><text:soft-page-break/><draw:frame draw:style-name="fr2" draw:name="影像3" text:anchor-type="as-char" svg:y="0cm" svg:width="16cm" svg:height="12.234cm" draw:z-index="2"><draw:image xlink:href="Pictures/1000000000000550000003D4E548CBA8.png" xlink:type="simple" xlink:show="embed" xlink:actuate="onLoad" draw:mime-type="image/png"/></draw:frame></text:p>
      <text:p text:style-name="P8"/>
      <table:table table:name="新增表格67" table:style-name="新增表格67">
        <table:table-column table:style-name="新增表格67.A"/>
        <table:table-row table:style-name="新增表格67.1">
          <table:table-cell table:style-name="新增表格67.A1" office:value-type="string">
            <text:p text:style-name="P33">✅ 兩個版本怎麼選？</text:p>
            <text:p text:style-name="P8">稠密圖（E ≈ V²）：O(V²) 矩陣版更省</text:p>
            <text:p text:style-name="P16">因為 O(E log V) ≈ O(V² log V) 反而更慢</text:p>
            <text:p text:style-name="P8">稀疏∼一般圖（E &lt;&lt; V²）：O(E log V) Heap 版更快</text:p>
            <text:p text:style-name="P62">判斷標準：<text:span text:style-name="T44">E 接近 V² → 用矩陣；E 遠小於 V² → 用 Heap</text:span></text:p>
          </table:table-cell>
        </table:table-row>
      </table:table>
      <text:p text:style-name="P6"/>
      <text:p text:style-name="P8"><draw:frame draw:style-name="fr2" draw:name="影像4" text:anchor-type="as-char" svg:y="0cm" svg:width="16cm" svg:height="8.941cm" draw:z-index="3"><draw:image xlink:href="Pictures/1000000000000550000002F8B3BF8B36.png" xlink:type="simple" xlink:show="embed" xlink:actuate="onLoad" draw:mime-type="image/png"/></draw:frame></text:p>
      <text:p text:style-name="P8"/>
      <text:p text:style-name="Standard"><text:soft-page-break/></text:p>
      <text:h text:style-name="P9" text:outline-level="1">四、Kruskal 演算法 ── 從邊開始，最小邊優先</text:h>
      <text:p text:style-name="P6"/>
      <text:h text:style-name="P10" text:outline-level="2">4-1 核心概念（超新手版解釋）</text:h>
      <text:p text:style-name="P6"/>
      <text:p text:style-name="P14">把 Kruskal 想像成「買電纜」：先把所有可用的電纜按費用從低到高排好，然後從最便宜的開始買，買一條就把它連上。唯一的限制是：「這條電纜連上後不能造成迴路（因為迴路代表多花了不必要的錢）」。</text:p>
      <text:p text:style-name="P6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1">Kruskal 執行步驟（只有5步！）：</text:p>
            <text:p text:style-name="P8">① 列出圖中所有邊，按「權重由小到大」排序。</text:p>
            <text:p text:style-name="P8">② 準備 Union-Find（下面會詳細解釋），一開始每個節點自成一組。</text:p>
            <text:p text:style-name="P8">③ 從最小邊 (u, v) 開始處理：查問 Find(u) 和 Find(v)。</text:p>
            <text:p text:style-name="P8">④ 如果 Find(u) ≠ Find(v)（兩個節點不同組）→ 加入 MST，合併兩組。</text:p>
            <text:p text:style-name="P8">⑤ 如果 Find(u) = Find(v)（兩個節點同組）→ 加了會成環，跳過！</text:p>
            <text:p text:style-name="P8">不斷重複直到選出 V-1 條邊，MST 完成。</text:p>
          </table:table-cell>
        </table:table-row>
      </table:table>
      <text:p text:style-name="P6"/>
      <text:h text:style-name="P10" text:outline-level="2">4-2 Union-Find（並查集）詳細解說</text:h>
      <text:p text:style-name="P6"/>
      <text:p text:style-name="P14">Union-Find 是一種追蹤「哪些節點已經屬於同一個連通組」的工具。每個節點都有一個「代表人（root）」，同組的節點共用同一個代表人。</text:p>
      <text:p text:style-name="P6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94">【Find 操作】：找到某個節點的代表人</text:p>
            <text:p text:style-name="P94">初始狀態：每個節點自己代表自己</text:p>
            <text:p text:style-name="P94">節點： <text:s/>A <text:s text:c="3"/>B <text:s text:c="3"/>C <text:s text:c="3"/>D <text:s text:c="3"/>E</text:p>
            <text:p text:style-name="P94">代表： <text:s/>A <text:s text:c="3"/>B <text:s text:c="3"/>C <text:s text:c="3"/>D <text:s text:c="3"/>E <text:s text:c="2"/>（每人自己是代表）</text:p>
            <text:p text:style-name="P94">集合：{A} <text:s/>{B} <text:s/>{C} <text:s/>{D} <text:s/>{E}</text:p>
            <text:p text:style-name="P94">─────────────────────────────────────────────────────────</text:p>
            <text:p text:style-name="P94">【Union 操作】：合併兩個節點所在的組</text:p>
            <text:p text:style-name="P94">Union(A, B)：把 A 的組和 B 的組合併 → B 的代表改成 A</text:p>
            <text:p text:style-name="P94">節點： <text:s/>A <text:s text:c="3"/>B <text:s text:c="3"/>C <text:s text:c="3"/>D <text:s text:c="3"/>E</text:p>
            <text:p text:style-name="P94">代表： <text:s/>A <text:s text:c="3"/>A <text:s text:c="3"/>C <text:s text:c="3"/>D <text:s text:c="3"/>E <text:s text:c="2"/>← B 的代表變成 A</text:p>
            <text:p text:style-name="P94">集合：{A,B} <text:s/>{C} <text:s/>{D} <text:s/>{E}</text:p>
            <text:p text:style-name="P94">Union(C, D)：集合：{A,B} <text:s/>{C,D} <text:s/>{E}</text:p>
            <text:p text:style-name="P94">Union(B, C)：Find(B)=A，Find(C)=C，不同 → 合併</text:p>
            <text:p text:style-name="P94">集合：{A,B,C,D} <text:s/>{E}</text:p>
            <text:p text:style-name="P94">問：Union(A, D)？</text:p>
            <text:p text:style-name="P94">Find(A)=A，Find(D)=A → 相同！→ 跳過，加了會成環！</text:p>
            <text:p text:style-name="P94">─────────────────────────────────────────────────────────</text:p>
            <text:p text:style-name="P94">核心口訣：同集合 → 跳過（會成環） <text:s/>不同集合 → 合併（加入 MST）</text:p>
          </table:table-cell>
        </table:table-row>
      </table:table>
      <text:p text:style-name="P6"/>
      <text:h text:style-name="P10" text:outline-level="2">4-3 完整圖解範例（5個節點）</text:h>
      <text:p text:style-name="P6"/>
      <text:p text:style-name="P14">範例圖：AB=1, AC=4, BC=2, BD=5, CD=3, DE=6, CE=8</text:p>
      <text:p text:style-name="P6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94">原始圖： <text:s text:c="16"/>A</text:p>
            <text:p text:style-name="P94"><text:s text:c="16"/>/ \</text:p>
            <text:p text:style-name="P94"><text:s text:c="15"/>1 <text:s text:c="2"/>4</text:p>
            <text:p text:style-name="P94"><text:s text:c="14"/>/ <text:s text:c="4"/>\</text:p>
            <text:p text:style-name="P94"><text:s text:c="13"/>B --2-- C --8-- E</text:p>
            <text:p text:style-name="P95"><text:soft-page-break/><text:span text:style-name="T63"><text:s text:c="14"/>\ <text:s text:c="4"/>/</text:span></text:p>
            <text:p text:style-name="P94"><text:s text:c="15"/>5 <text:s text:c="2"/>3</text:p>
            <text:p text:style-name="P94"><text:s text:c="16"/>\ /</text:p>
            <text:p text:style-name="P94"><text:s text:c="17"/>D --6-- E</text:p>
            <text:p text:style-name="P95"/>
            <text:p text:style-name="P94">所有邊排序（由小到大）：AB=1, BC=2, CD=3, AC=4, BD=5, DE=6, CE=8</text:p>
          </table:table-cell>
        </table:table-row>
      </table:table>
      <text:p text:style-name="P6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96">Step 1：選最小邊 AB=1</text:p>
            <text:p text:style-name="P46">Find(A)=A <text:s text:c="3"/>Find(B)=B <text:s text:c="3"/>← 不同集合！可以加入</text:p>
            <text:p text:style-name="P46">Union(A, B) → 合併成 {A,B}</text:p>
            <text:p text:style-name="P46">集合狀態：{A,B} <text:s/>{C} <text:s/>{D} <text:s/>{E}</text:p>
            <text:p text:style-name="P46">已選邊：AB=1 <text:s/>（共 1 條）</text:p>
            <text:p text:style-name="P46">圖的連線狀態：A──1──B <text:s text:c="7"/>C <text:s text:c="10"/>D <text:s text:c="10"/>E</text:p>
          </table:table-cell>
        </table:table-row>
      </table:table>
      <text:p text:style-name="P6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96">Step 2：選次小邊 BC=2</text:p>
            <text:p text:style-name="P46">Find(B)=A <text:s text:c="3"/>Find(C)=C <text:s text:c="3"/>← 不同集合！可以加入</text:p>
            <text:p text:style-name="P46">Union(B, C) → 即 Union(A, C) → {A,B,C}</text:p>
            <text:p text:style-name="P46">集合狀態：{A,B,C} <text:s/>{D} <text:s/>{E}</text:p>
            <text:p text:style-name="P46">已選邊：AB=1, BC=2 <text:s/>（共 2 條）</text:p>
            <text:p text:style-name="P46">圖的連線狀態：A──1──B──2──C <text:s text:c="7"/>D <text:s text:c="10"/>E</text:p>
          </table:table-cell>
        </table:table-row>
      </table:table>
      <text:p text:style-name="P6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6">Step 3：選次小邊 CD=3</text:p>
            <text:p text:style-name="P46">Find(C)=A <text:s text:c="3"/>Find(D)=D <text:s text:c="3"/>← 不同集合！可以加入</text:p>
            <text:p text:style-name="P46">Union(C, D) → 即 Union(A, D) → {A,B,C,D}</text:p>
            <text:p text:style-name="P46">集合狀態：{A,B,C,D} <text:s/>{E}</text:p>
            <text:p text:style-name="P46">已選邊：AB=1, BC=2, CD=3 <text:s/>（共 3 條）</text:p>
            <text:p text:style-name="P46">圖的連線狀態：A──1──B──2──C──3──D <text:s text:c="7"/>E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97">Step 4：看邊 AC=4 → ⛔ 跳過！</text:p>
            <text:p text:style-name="P46">Find(A)=A <text:s text:c="3"/>Find(C)=A <text:s text:c="3"/>← 相同集合！加了會成環</text:p>
            <text:p text:style-name="P46">若加入 A─C：</text:p>
            <text:p text:style-name="P46"><text:s text:c="2"/>A──1──B──2──C</text:p>
            <text:p text:style-name="P46"><text:s text:c="2"/>└──────────4──┘ <text:s text:c="2"/>← A─B─C─A 形成三角形迴路！</text:p>
            <text:p text:style-name="P46">⛔ 跳過 AC=4</text:p>
          </table:table-cell>
        </table:table-row>
      </table:table>
      <text:p text:style-name="P6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7">Step 5：看邊 BD=5 → ⛔ 跳過！</text:p>
            <text:p text:style-name="P46">Find(B)=A <text:s text:c="3"/>Find(D)=A <text:s text:c="3"/>← 相同集合！加了會成環</text:p>
            <text:p text:style-name="P46">若加入 B─D：B 和 D 已透過 B─C─D 相連，成環！</text:p>
            <text:p text:style-name="P46">⛔ 跳過 BD=5</text:p>
          </table:table-cell>
        </table:table-row>
      </table:table>
      <text:p text:style-name="P6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96">Step 6：選邊 DE=6 ← 最後一條！</text:p>
            <text:p text:style-name="P46">Find(D)=A <text:s text:c="3"/>Find(E)=E <text:s text:c="3"/>← 不同集合！可以加入</text:p>
            <text:p text:style-name="P46">Union(D, E) → {A,B,C,D,E} <text:s/>所有節點都在同一組了！</text:p>
            <text:p text:style-name="P46">集合狀態：{A,B,C,D,E}</text:p>
            <text:p text:style-name="P46">已選邊：AB=1, BC=2, CD=3, DE=6 <text:s/>（共 4 條 = V-1 ✅）</text:p>
            <text:p text:style-name="P46">圖的連線狀態：A──1──B──2──C──3──D──6──E</text:p>
            <text:p text:style-name="P46">✅ 所有節點已連通，MST 完成！</text:p>
          </table:table-cell>
        </table:table-row>
      </table:table>
      <text:p text:style-name="P6"/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72">✅ MST 完成</text:p>
            <text:p text:style-name="P98">MST 邊集合：AB=1, BC=2, CD=3, DE=6</text:p>
            <text:p text:style-name="P74">總權重：1 + 2 + 3 + 6 = 12</text:p>
            <text:p text:style-name="P75">邊數驗證：V-1 = 5-1 = 4 條 <text:s/>✅</text:p>
          </table:table-cell>
        </table:table-row>
      </table:table>
      <text:p text:style-name="P6"/>
      <text:h text:style-name="P99" text:outline-level="2"><text:soft-page-break/><text:span text:style-name="T64">4-4 Kruskal 程式實作（C++）</text:span></text:h>
      <text:p text:style-name="P6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81">// ── 需要的標頭檔 ────────────────────────────────────────────</text:p>
            <text:p text:style-name="P80">#include &lt;iostream&gt; // cout</text:p>
            <text:p text:style-name="P80">#include &lt;vector&gt; // vector：動態陣列</text:p>
            <text:p text:style-name="P80">#include &lt;algorithm&gt; // sort：排序函式</text:p>
            <text:p text:style-name="P80">#include &lt;numeric&gt; // iota：把陣列填成 0,1,2,3...</text:p>
            <text:p text:style-name="P80">using namespace std;</text:p>
            <text:p text:style-name="P82"/>
            <text:p text:style-name="P81">// ── Union-Find（並查集）────────────────────────────────────</text:p>
            <text:p text:style-name="P83">// 功能：快速判斷「兩個節點是不是已在同一個連通組裡」</text:p>
            <text:p text:style-name="P83">// 如果是同一組 → 加了這條邊會成環 → 跳過</text:p>
            <text:p text:style-name="P83">// 如果不同組 → 加這條邊，把兩組合併</text:p>
            <text:p text:style-name="P80">struct UnionFind {</text:p>
            <text:p text:style-name="P80">vector&lt;int&gt; parent; // parent[i] = i 的「代表人」</text:p>
            <text:p text:style-name="P80">vector&lt;int&gt; rank_; // rank_[i] = 以 i 為根的樹高（優化用）</text:p>
            <text:p text:style-name="P82"/>
            <text:p text:style-name="P83">// 建構子：n個節點，一開始每人代表自己</text:p>
            <text:p text:style-name="P80">UnionFind(int n) : parent(n), rank_(n, 0) {</text:p>
            <text:p text:style-name="P80">iota(parent.begin(), parent.end(), 0);</text:p>
            <text:p text:style-name="P83">// 結果：parent = {0, 1, 2, 3, ...}</text:p>
            <text:p text:style-name="P80">}</text:p>
            <text:p text:style-name="P82"/>
            <text:p text:style-name="P83">// find：找 x 的代表人（根節點）</text:p>
            <text:p text:style-name="P83">// 「路徑壓縮」：找完之後把沿路的節點直接指向根</text:p>
            <text:p text:style-name="P83">// 這讓下次再找同一節點時幾乎是 O(1)</text:p>
            <text:p text:style-name="P80">int find(int x) {</text:p>
            <text:p text:style-name="P80">if (parent[x] != x)</text:p>
            <text:p text:style-name="P80">parent[x] = find(parent[x]); // 遞迴找根，順便壓縮</text:p>
            <text:p text:style-name="P80">return parent[x];</text:p>
            <text:p text:style-name="P80">}</text:p>
            <text:p text:style-name="P82"/>
            <text:p text:style-name="P83">// unite：把 x 和 y 所在的兩組合併</text:p>
            <text:p text:style-name="P83">// 回傳 true = 合併成功（兩組不同）</text:p>
            <text:p text:style-name="P83">// 回傳 false = 本來就同組，不用合併（加了會成環）</text:p>
            <text:p text:style-name="P80">bool unite(int x, int y) {</text:p>
            <text:p text:style-name="P80">int rx = find(x); // x 的代表人</text:p>
            <text:p text:style-name="P80">int ry = find(y); // y 的代表人</text:p>
            <text:p text:style-name="P80">if (rx == ry) return false; // 同組！跳過</text:p>
            <text:p text:style-name="P82"/>
            <text:p text:style-name="P83">// 按 rank 合併：把矮樹接到高樹下面</text:p>
            <text:p text:style-name="P83">// 這樣樹不會長太高，find 保持快速</text:p>
            <text:p text:style-name="P80">if (rank_[rx] &lt; rank_[ry]) swap(rx, ry);</text:p>
            <text:p text:style-name="P80">parent[ry] = rx; // ry 的根改成 rx</text:p>
            <text:p text:style-name="P80">if (rank_[rx] == rank_[ry]) rank_[rx]++;</text:p>
            <text:p text:style-name="P80">return true;</text:p>
            <text:p text:style-name="P80">}</text:p>
            <text:p text:style-name="P80">};</text:p>
            <text:p text:style-name="P82"/>
            <text:p text:style-name="P81">// ── 定義「邊」的結構 ────────────────────────────────────────</text:p>
            <text:p text:style-name="P83">// 每條邊有三個資訊：起點u、終點v、費用w</text:p>
            <text:p text:style-name="P80">struct Edge { int u, v, w; };</text:p>
            <text:p text:style-name="P82"/>
            <text:p text:style-name="P81">// ── Kruskal 主函式 ──────────────────────────────────────────</text:p>
            <text:p text:style-name="P83">// 輸入：n（節點數）、edges（所有邊）</text:p>
            <text:p text:style-name="P83">// 輸出：MST 邊清單 + 總權重</text:p>
            <text:p text:style-name="P80">pair&lt;vector&lt;Edge&gt;, int&gt;</text:p>
            <text:p text:style-name="P80">kruskal(int n, vector&lt;Edge&gt;&amp; edges) {</text:p>
            <text:p text:style-name="P82"/>
            <text:p text:style-name="P83">// Step 1：把所有邊按費用由小到大排序</text:p>
            <text:p text:style-name="P83"><text:soft-page-break/>// sort 的第三個參數是「比較函式」，告訴它怎麼比大小</text:p>
            <text:p text:style-name="P83">// lambda [](a, b){ return a.w &lt; b.w } = 費用小的排前面</text:p>
            <text:p text:style-name="P80">sort(edges.begin(), edges.end(),</text:p>
            <text:p text:style-name="P80">[](const Edge&amp; a, const Edge&amp; b){ return a.w &lt; b.w; });</text:p>
            <text:p text:style-name="P82"/>
            <text:p text:style-name="P83">// Step 2：初始化 Union-Find</text:p>
            <text:p text:style-name="P83">// 一開始每個節點自成一組（n 個獨立的小集合）</text:p>
            <text:p text:style-name="P80">UnionFind uf(n);</text:p>
            <text:p text:style-name="P82"/>
            <text:p text:style-name="P80">vector&lt;Edge&gt; mst; // 最終 MST 選到的邊</text:p>
            <text:p text:style-name="P80">int total = 0; // MST 總費用</text:p>
            <text:p text:style-name="P82"/>
            <text:p text:style-name="P83">// Step 3：依序處理每條邊（已排序，從最便宜開始）</text:p>
            <text:p text:style-name="P80">for (auto&amp; e : edges) {</text:p>
            <text:p text:style-name="P82"/>
            <text:p text:style-name="P83">// 嘗試把 e.u 和 e.v 合併</text:p>
            <text:p text:style-name="P83">// unite 回傳 true = 兩端原本不同組 → 可以加這條邊</text:p>
            <text:p text:style-name="P83">// unite 回傳 false = 兩端已同組 → 加了會成環，跳過</text:p>
            <text:p text:style-name="P80">if (uf.unite(e.u, e.v)) {</text:p>
            <text:p text:style-name="P80">mst.push_back(e); // 加入 MST</text:p>
            <text:p text:style-name="P80">total += e.w;</text:p>
            <text:p text:style-name="P80">if ((int)mst.size() == n - 1) break; // 選滿V-1條就結束</text:p>
            <text:p text:style-name="P80">}</text:p>
            <text:p text:style-name="P83">// else：兩端同組，這條邊加了會成環，直接跳過</text:p>
            <text:p text:style-name="P80">}</text:p>
            <text:p text:style-name="P80">return {mst, total};</text:p>
            <text:p text:style-name="P80">}</text:p>
            <text:p text:style-name="P82"/>
            <text:p text:style-name="P81">// ── 測試程式 ─────────────────────────────────────────────────</text:p>
            <text:p text:style-name="P83">// 節點：A=0, B=1, C=2, D=3, E=4</text:p>
            <text:p text:style-name="P83">// 邊（已含所有邊，Kruskal 會自動排序）：</text:p>
            <text:p text:style-name="P83">// AB=1, BC=2, CD=3, AC=4, BD=5, DE=6, CE=8</text:p>
            <text:p text:style-name="P83">// 預期 MST：AB=1+BC=2+CD=3+DE=6 = 12</text:p>
            <text:p text:style-name="P80">int main() {</text:p>
            <text:p text:style-name="P80">int n = 5;</text:p>
            <text:p text:style-name="P80">vector&lt;Edge&gt; edges = {</text:p>
            <text:p text:style-name="P80">{0,1,1}, // AB=1</text:p>
            <text:p text:style-name="P80">{1,2,2}, // BC=2</text:p>
            <text:p text:style-name="P80">{2,3,3}, // CD=3</text:p>
            <text:p text:style-name="P80">{0,2,4}, // AC=4</text:p>
            <text:p text:style-name="P80">{1,3,5}, // BD=5</text:p>
            <text:p text:style-name="P80">{3,4,6}, // DE=6</text:p>
            <text:p text:style-name="P80">{2,4,8} // CE=8</text:p>
            <text:p text:style-name="P80">};</text:p>
            <text:p text:style-name="P82"/>
            <text:p text:style-name="P80">auto [mst, total] = kruskal(n, edges);</text:p>
            <text:p text:style-name="P82"/>
            <text:p text:style-name="P80">cout &lt;&lt; "MST 邊：\n";</text:p>
            <text:p text:style-name="P80">for (auto&amp; e : mst)</text:p>
            <text:p text:style-name="P80">cout &lt;&lt; e.u &lt;&lt; "-" &lt;&lt; e.v &lt;&lt; " 費用=" &lt;&lt; e.w &lt;&lt; "\n";</text:p>
            <text:p text:style-name="P80">cout &lt;&lt; "總權重：" &lt;&lt; total &lt;&lt; "\n"; // 應該是 12</text:p>
            <text:p text:style-name="P80">return 0;</text:p>
            <text:p text:style-name="P80">}</text:p>
          </table:table-cell>
        </table:table-row>
      </table:table>
      <text:p text:style-name="P6"/>
      <text:p text:style-name="Standard"/>
      <text:h text:style-name="P10" text:outline-level="2">4-5 Kruskal 時間複雜度 ── 逐步推導</text:h>
      <text:p text:style-name="P6"/>
      <table:table table:name="新增表格68" table:style-name="新增表格68">
        <table:table-column table:style-name="新增表格68.A"/>
        <table:table-row table:style-name="新增表格68.1">
          <table:table-cell table:style-name="新增表格68.A1" office:value-type="string">
            <text:p text:style-name="P11">結論：Kruskal 時間複雜度 = O(E log E)<text:soft-page-break/></text:p>
            <text:p text:style-name="P8">也可寫成 O(E log V)，兩者在 Big-O 意義下相等（見後文說明）。</text:p>
          </table:table-cell>
        </table:table-row>
      </table:table>
      <text:p text:style-name="P6"/>
      <table:table table:name="新增表格69" table:style-name="新增表格69">
        <table:table-column table:style-name="新增表格69.A"/>
        <table:table-row table:style-name="新增表格69.1">
          <table:table-cell table:style-name="新增表格69.A1" office:value-type="string">
            <text:p text:style-name="P7">Kruskal 分成兩個獨立階段：</text:p>
            <text:p text:style-name="P36">階段一：排序所有邊</text:p>
            <text:p text:style-name="P36">階段二：用 Union-Find 逐條處理每條邊</text:p>
          </table:table-cell>
        </table:table-row>
      </table:table>
      <text:p text:style-name="P6"/>
      <table:table table:name="新增表格70" table:style-name="新增表格70">
        <table:table-column table:style-name="新增表格70.A"/>
        <table:table-row table:style-name="新增表格70.1">
          <table:table-cell table:style-name="新增表格70.A1" office:value-type="string">
            <text:p text:style-name="P7">【階段一】排序所有邊 → O(E log E)</text:p>
            <text:p text:style-name="P8"/>
            <text:p text:style-name="P8">Kruskal 第一步要把圖裡所有 E 條邊按權重由小到大排好。</text:p>
            <text:p text:style-name="P8">排序演算法（Merge Sort / Heap Sort 等）的時間複雜度是 O(n log n)，</text:p>
            <text:p text:style-name="P8">這裡 n 就是邊數 E，所以排序花費 O(E log E)。</text:p>
            <text:p text:style-name="P8"/>
            <text:p text:style-name="P16">直覺理解：E 條邊，每條邊在排序過程中平均被比較 log E 次</text:p>
            <text:p text:style-name="P16">→ 共 E × log E 次比較 → O(E log E)。</text:p>
          </table:table-cell>
        </table:table-row>
      </table:table>
      <text:p text:style-name="P6"/>
      <table:table table:name="新增表格71" table:style-name="新增表格71">
        <table:table-column table:style-name="新增表格71.A"/>
        <table:table-row table:style-name="新增表格71.1">
          <table:table-cell table:style-name="新增表格71.A1" office:value-type="string">
            <text:p text:style-name="P7">【階段二】Union-Find 處理每條邊 → O(E α(V)) ≈ O(E)</text:p>
            <text:p text:style-name="P8"/>
            <text:p text:style-name="P8">排序後逐條掃描，每條邊做一次 Find + 可能一次 Union。</text:p>
            <text:p text:style-name="P8"/>
            <text:p text:style-name="P36">Union-Find 的兩個關鍵優化：</text:p>
            <text:p text:style-name="P41">① 路徑壓縮（Path Compression）</text:p>
            <text:p text:style-name="P8">Find 時把沿途節點直接指向根，讓下次 Find 更快。</text:p>
            <text:p text:style-name="P41">② 按 Rank 合併（Union by Rank）</text:p>
            <text:p text:style-name="P8">Union 時把矮樹接到高樹下面，防止樹長太高。</text:p>
            <text:p text:style-name="P8"/>
            <text:p text:style-name="P8">兩個優化合在一起，每次 Find/Union 幾乎是 O(1)——</text:p>
            <text:p text:style-name="P8">嚴格來說是 O(α(V))，α 是反阿克曼函數，對所有實際情況 α(V) ≤ 4。</text:p>
            <text:p text:style-name="P23">→ E 條邊 × O(α(V)) ≈ O(E)</text:p>
          </table:table-cell>
        </table:table-row>
      </table:table>
      <text:p text:style-name="P6"/>
      <table:table table:name="新增表格72" table:style-name="新增表格72">
        <table:table-column table:style-name="新增表格72.A"/>
        <table:table-column table:style-name="新增表格72.B"/>
        <table:table-column table:style-name="新增表格72.C"/>
        <table:table-column table:style-name="新增表格72.D"/>
        <table:table-row table:style-name="新增表格72.1">
          <table:table-cell table:style-name="新增表格72.A1" office:value-type="string">
            <text:p text:style-name="P84">階段</text:p>
          </table:table-cell>
          <table:table-cell table:style-name="新增表格72.A1" office:value-type="string">
            <text:p text:style-name="P84">操作</text:p>
          </table:table-cell>
          <table:table-cell table:style-name="新增表格72.A1" office:value-type="string">
            <text:p text:style-name="P84">次數</text:p>
          </table:table-cell>
          <table:table-cell table:style-name="新增表格72.A1" office:value-type="string">
            <text:p text:style-name="P84">花費</text:p>
          </table:table-cell>
        </table:table-row>
        <table:table-row table:style-name="新增表格72.1">
          <table:table-cell table:style-name="新增表格72.A2" office:value-type="string">
            <text:p text:style-name="P8">① 排序所有邊</text:p>
          </table:table-cell>
          <table:table-cell table:style-name="新增表格72.A2" office:value-type="string">
            <text:p text:style-name="P8">排序 E 條邊</text:p>
          </table:table-cell>
          <table:table-cell table:style-name="新增表格72.A2" office:value-type="string">
            <text:p text:style-name="P8">1 次</text:p>
          </table:table-cell>
          <table:table-cell table:style-name="新增表格72.A2" office:value-type="string">
            <text:p text:style-name="P8">O(E log E)</text:p>
          </table:table-cell>
        </table:table-row>
        <table:table-row table:style-name="新增表格72.1">
          <table:table-cell table:style-name="新增表格72.A3" office:value-type="string">
            <text:p text:style-name="P8">② Find（查代表人）</text:p>
          </table:table-cell>
          <table:table-cell table:style-name="新增表格72.A3" office:value-type="string">
            <text:p text:style-name="P8">每條邊 2 次</text:p>
          </table:table-cell>
          <table:table-cell table:style-name="新增表格72.A3" office:value-type="string">
            <text:p text:style-name="P8">共 2E 次</text:p>
          </table:table-cell>
          <table:table-cell table:style-name="新增表格72.A3" office:value-type="string">
            <text:p text:style-name="P8">O(E α(V)) ≈ O(E)</text:p>
          </table:table-cell>
        </table:table-row>
        <table:table-row table:style-name="新增表格72.1">
          <table:table-cell table:style-name="新增表格72.A2" office:value-type="string">
            <text:p text:style-name="P8">② Union（合併集合）</text:p>
          </table:table-cell>
          <table:table-cell table:style-name="新增表格72.A2" office:value-type="string">
            <text:p text:style-name="P8">最多 V-1 次</text:p>
          </table:table-cell>
          <table:table-cell table:style-name="新增表格72.A2" office:value-type="string">
            <text:p text:style-name="P8">共 V-1 次</text:p>
          </table:table-cell>
          <table:table-cell table:style-name="新增表格72.A2" office:value-type="string">
            <text:p text:style-name="P8">O(V α(V)) ≈ O(V)</text:p>
          </table:table-cell>
        </table:table-row>
        <table:table-row table:style-name="新增表格72.1">
          <table:table-cell table:style-name="新增表格72.A5" office:value-type="string">
            <text:p text:style-name="P33">總計</text:p>
          </table:table-cell>
          <table:table-cell table:style-name="新增表格72.A5" office:value-type="string">
            <text:p text:style-name="P33">—</text:p>
          </table:table-cell>
          <table:table-cell table:style-name="新增表格72.A5" office:value-type="string">
            <text:p text:style-name="P33">—</text:p>
          </table:table-cell>
          <table:table-cell table:style-name="新增表格72.A5" office:value-type="string">
            <text:p text:style-name="P33">O(E log E) ← 排序主導</text:p>
          </table:table-cell>
        </table:table-row>
      </table:table>
      <text:p text:style-name="P6"/>
      <table:table table:name="新增表格73" table:style-name="新增表格73">
        <table:table-column table:style-name="新增表格73.A"/>
        <table:table-row table:style-name="新增表格73.1">
          <table:table-cell table:style-name="新增表格73.A1" office:value-type="string">
            <text:p text:style-name="P25">為什麼總複雜度由排序主導？</text:p>
            <text:p text:style-name="P8">排序花費 O(E log E)，Union-Find 花費約 O(E)。</text:p>
            <text:p text:style-name="P8">O(E log E) &gt;&gt; O(E)，所以加起來還是 O(E log E)。</text:p>
            <text:p text:style-name="P8"/>
            <text:p text:style-name="P16">類比：搬家打包花 3 小時，搬進去只花 10 分鐘 → 總時間還是 3 小時。</text:p>
            <text:p text:style-name="P62"><text:soft-page-break/>→ 瓶頸（最慢的那段）決定總花費。</text:p>
          </table:table-cell>
        </table:table-row>
      </table:table>
      <text:p text:style-name="P6"/>
      <table:table table:name="新增表格74" table:style-name="新增表格74">
        <table:table-column table:style-name="新增表格74.A"/>
        <table:table-row table:style-name="新增表格74.1">
          <table:table-cell table:style-name="新增表格74.A1" office:value-type="string">
            <text:p text:style-name="P25">O(E log E) 和 O(E log V) 有差嗎？</text:p>
            <text:p text:style-name="P8">E ≤ V(V-1)/2 ≈ V²，所以：</text:p>
            <text:p text:style-name="P41">log E ≤ log V² = 2 log V = O(log V)</text:p>
            <text:p text:style-name="P8">反過來 E ≥ V-1，所以 log E ≥ log(V-1) ≈ log V。</text:p>
            <text:p text:style-name="P8">→ log E 和 log V 差一個常數倍，Big-O 意義下相等：</text:p>
            <text:p text:style-name="P23">O(E log E) = O(E log V)，兩種寫法都被接受。</text:p>
          </table:table-cell>
        </table:table-row>
      </table:table>
      <text:p text:style-name="P6"/>
      <table:table table:name="新增表格75" table:style-name="新增表格75">
        <table:table-column table:style-name="新增表格75.A"/>
        <table:table-row table:style-name="新增表格75.1">
          <table:table-cell table:style-name="新增表格75.A1" office:value-type="string">
            <text:p text:style-name="P33">✅ 一句話記住 Kruskal 複雜度</text:p>
            <text:p text:style-name="P8">Kruskal 的時間由「排序」決定，排 E 條邊就花 O(E log E)，Union-Find 幾乎免費。</text:p>
          </table:table-cell>
        </table:table-row>
      </table:table>
      <text:p text:style-name="P6"/>
      <text:p text:style-name="P8"><draw:frame draw:style-name="fr2" draw:name="Complexity_Kruskal" text:anchor-type="as-char" svg:y="0cm" svg:width="16cm" svg:height="12cm" draw:z-index="4"><draw:image xlink:href="Pictures/1000000000000550000003FCD632297D.png" xlink:type="simple" xlink:show="embed" xlink:actuate="onLoad" draw:mime-type="image/png"/></draw:frame></text:p>
      <text:p text:style-name="P8"/>
      <text:h text:style-name="P9" text:outline-level="1">五、Sollin（Borůvka）演算法 ── 大家同時搶最便宜的邊</text:h>
      <text:p text:style-name="P6"/>
      <text:h text:style-name="P10" text:outline-level="2">5-1 核心概念（超新手版解釋）</text:h>
      <text:p text:style-name="P6"/>
      <text:p text:style-name="P14">想像很多個小部落（每個節點是一個部落），大家同時公告「我要接通的最便宜鄰居」，然後按這些公告同時合併。合併後變成幾個大部落，再重複一輪，直到只剩一個大部落。</text:p>
      <text:p text:style-name="P6"/>
      <text:p text:style-name="P14">這就是 Sollin 最大的特色：不是一個個慢慢來，而是「全體同時行動」，因此非常適合分散式系統（每台電腦各自計算）。</text:p>
      <text:p text:style-name="P6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1">Sollin 執行步驟（只有4步）：</text:p>
            <text:p text:style-name="P8">① 初始：每個節點自成一個 Component（一個小圓圈）。</text:p>
            <text:p text:style-name="P8">② 同一輪：每個 Component 掃描自己能連出去的所有邊，找出「最便宜的外連邊」。</text:p>
            <text:p text:style-name="P8">③ 把所有被選中的邊一起加入 MST（若兩個 Component 互選同一條邊，只算一次）。</text:p>
            <text:p text:style-name="P8">④ 合併後重新算 Component，重複步驟②③，直到只剩一個 Component。</text:p>
            <text:p text:style-name="P8">別名：Sollin 和 Borůvka 是同一個演算法，兩個名字都可能出現在考試！</text:p>
          </table:table-cell>
        </table:table-row>
      </table:table>
      <text:p text:style-name="P6"/>
      <text:h text:style-name="P10" text:outline-level="2">5-2 完整圖解範例（5個節點，圖片原題）</text:h>
      <text:p text:style-name="P6"/>
      <text:p text:style-name="P14">範例：5個節點 A, B, C, D, E。各節點最短外連邊如下（來自原始圖片）：</text:p>
      <text:p text:style-name="P6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4">各節點選擇的最短外連邊：</text:p>
            <text:p text:style-name="P94"><text:s text:c="2"/>A → (A,D)=14 <text:s text:c="3"/>B → (B,C)=15 <text:s text:c="3"/>C → (C,D)=13</text:p>
            <text:p text:style-name="P94"><text:s text:c="2"/>D → (D,E)=12 <text:s text:c="3"/>E → (D,E)=12 <text:s/>（D 和 E 都選同一條邊！）</text:p>
            <text:p text:style-name="P94">初始 Component：{A} <text:s/>{B} <text:s/>{C} <text:s/>{D} <text:s/>{E}</text:p>
          </table:table-cell>
        </table:table-row>
      </table:table>
      <text:p text:style-name="P6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63">Step 1：第一輪：所有 Component 同時找最短外連邊</text:p>
            <text:p text:style-name="P94">Component {A}：最短外連邊 = (A,D)=14 <text:s/>→ 提名 A─D</text:p>
            <text:p text:style-name="P94">Component {B}：最短外連邊 = (B,C)=15 <text:s/>→ 提名 B─C</text:p>
            <text:p text:style-name="P94">Component {C}：最短外連邊 = (C,D)=13 <text:s/>→ 提名 C─D</text:p>
            <text:p text:style-name="P94">Component {D}：最短外連邊 = (D,E)=12 <text:s/>→ 提名 D─E</text:p>
            <text:p text:style-name="P94">Component {E}：最短外連邊 = (D,E)=12 <text:s/>→ 提名 D─E（同一條，只算一次）</text:p>
            <text:p text:style-name="P95"/>
            <text:p text:style-name="P94">本輪加入邊：A─D=14, B─C=15, C─D=13, D─E=12</text:p>
            <text:p text:style-name="P94">合併後：{A,D,E} + {C,D} = {A,C,D,E} <text:s/>再加 {B,C} → {A,B,C,D,E}</text:p>
            <text:p text:style-name="P95"/>
            <text:p text:style-name="P94">最終 MST 樣子：</text:p>
            <text:p text:style-name="P94"><text:s text:c="2"/>B──15──C──13──D──12──E</text:p>
            <text:p text:style-name="P94"><text:s text:c="14"/>│</text:p>
            <text:p text:style-name="P94"><text:s text:c="13"/>14</text:p>
            <text:p text:style-name="P94"><text:s text:c="14"/>│</text:p>
            <text:p text:style-name="P94"><text:s text:c="14"/>A</text:p>
          </table:table-cell>
        </table:table-row>
      </table:table>
      <text:p text:style-name="P6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72">✅ 一輪就完成！所有節點連成一個 Component</text:p>
            <text:p text:style-name="P98">MST 邊集合：A─D=14, B─C=15, C─D=13, D─E=12</text:p>
            <text:p text:style-name="P74">總權重：14 + 15 + 13 + 12 = 54</text:p>
            <text:p text:style-name="P75">邊數驗證：V-1 = 5-1 = 4 條 <text:s/>✅</text:p>
          </table:table-cell>
        </table:table-row>
      </table:table>
      <text:p text:style-name="P6"/>
      <text:h text:style-name="P99" text:outline-level="2"><text:soft-page-break/><text:span text:style-name="T64">5-3 需要兩輪的範例</text:span></text:h>
      <text:p text:style-name="P6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94">範例圖：A─1─B，B─4─C，C─2─D，A─5─D</text:p>
            <text:p text:style-name="P94">初始 Component：{A} <text:s/>{B} <text:s/>{C} <text:s/>{D}</text:p>
            <text:p text:style-name="P95"/>
            <text:p text:style-name="P94">───── 第一輪 ──────────────────────────────────────────</text:p>
            <text:p text:style-name="P94">{A}：最短外連邊 = A─B=1 <text:s/>→ 提名 A─B</text:p>
            <text:p text:style-name="P94">{B}：最短外連邊 = A─B=1 <text:s/>→ 提名 A─B（同一條）</text:p>
            <text:p text:style-name="P94">{C}：最短外連邊 = C─D=2 <text:s/>→ 提名 C─D</text:p>
            <text:p text:style-name="P94">{D}：最短外連邊 = C─D=2 <text:s/>→ 提名 C─D（同一條）</text:p>
            <text:p text:style-name="P94">加入：A─B=1, C─D=2</text:p>
            <text:p text:style-name="P94">合併後 Component：{A,B} <text:s/>{C,D}</text:p>
            <text:p text:style-name="P95"/>
            <text:p text:style-name="P94">───── 第二輪 ──────────────────────────────────────────</text:p>
            <text:p text:style-name="P94">{A,B}：最短外連邊 = B─C=4 <text:s/>→ 提名 B─C</text:p>
            <text:p text:style-name="P94">{C,D}：最短外連邊 = B─C=4 <text:s/>→ 提名 B─C（同一條）</text:p>
            <text:p text:style-name="P94">加入：B─C=4</text:p>
            <text:p text:style-name="P94">合併後 Component：{A,B,C,D} <text:s/>← 只剩一個！完成！</text:p>
            <text:p text:style-name="P95"/>
            <text:p text:style-name="P94">MST = A─B=1, C─D=2, B─C=4 <text:s text:c="4"/>總重 = 7</text:p>
          </table:table-cell>
        </table:table-row>
      </table:table>
      <text:p text:style-name="P6"/>
      <text:h text:style-name="P10" text:outline-level="2">5-4 Sollin 程式實作（C++）</text:h>
      <text:p text:style-name="P6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81">// ── 需要的標頭檔 ────────────────────────────────────────────</text:p>
            <text:p text:style-name="P80">#include &lt;iostream&gt;</text:p>
            <text:p text:style-name="P80">#include &lt;vector&gt;</text:p>
            <text:p text:style-name="P80">#include &lt;numeric&gt; // iota</text:p>
            <text:p text:style-name="P80">#include &lt;climits&gt; // INT_MAX</text:p>
            <text:p text:style-name="P80">using namespace std;</text:p>
            <text:p text:style-name="P82"/>
            <text:p text:style-name="P81">// ── Union-Find（與 Kruskal 版相同，用來追蹤連通組）────────</text:p>
            <text:p text:style-name="P80">struct UnionFind {</text:p>
            <text:p text:style-name="P80">vector&lt;int&gt; parent;</text:p>
            <text:p text:style-name="P80">UnionFind(int n) : parent(n) {</text:p>
            <text:p text:style-name="P80">iota(parent.begin(), parent.end(), 0);</text:p>
            <text:p text:style-name="P80">}</text:p>
            <text:p text:style-name="P80">int find(int x) {</text:p>
            <text:p text:style-name="P83">// 路徑壓縮：把沿途節點直接指向根，加速下次查詢</text:p>
            <text:p text:style-name="P80">while (parent[x] != x) {</text:p>
            <text:p text:style-name="P80">parent[x] = parent[parent[x]]; // 跳兩層壓縮</text:p>
            <text:p text:style-name="P80">x = parent[x];</text:p>
            <text:p text:style-name="P80">}</text:p>
            <text:p text:style-name="P80">return x;</text:p>
            <text:p text:style-name="P80">}</text:p>
            <text:p text:style-name="P80">bool unite(int x, int y) {</text:p>
            <text:p text:style-name="P80">int rx = find(x), ry = find(y);</text:p>
            <text:p text:style-name="P80">if (rx == ry) return false; // 同組</text:p>
            <text:p text:style-name="P80">parent[rx] = ry; // 把 rx 接到 ry 下面</text:p>
            <text:p text:style-name="P80">return true;</text:p>
            <text:p text:style-name="P80">}</text:p>
            <text:p text:style-name="P80">};</text:p>
            <text:p text:style-name="P82"/>
            <text:p text:style-name="P81">// ── 定義「邊」的結構 ────────────────────────────────────────</text:p>
            <text:p text:style-name="P80">struct Edge { int u, v, w; };</text:p>
            <text:p text:style-name="P82"/>
            <text:p text:style-name="P81">// ── Sollin 主函式 ───────────────────────────────────────────</text:p>
            <text:p text:style-name="P83">// 核心想法：每一輪，所有 Component「同時」找自己最便宜的外連邊</text:p>
            <text:p text:style-name="P83">// 然後一起合併 → Component 數量至少減半 → 最多 log V 輪結束</text:p>
            <text:p text:style-name="P80"><text:soft-page-break/>pair&lt;vector&lt;Edge&gt;, int&gt;</text:p>
            <text:p text:style-name="P80">sollin(int n, const vector&lt;Edge&gt;&amp; edges) {</text:p>
            <text:p text:style-name="P80">UnionFind uf(n);</text:p>
            <text:p text:style-name="P80">vector&lt;Edge&gt; mst; // 最終選出的 MST 邊</text:p>
            <text:p text:style-name="P80">int total = 0;</text:p>
            <text:p text:style-name="P82"/>
            <text:p text:style-name="P83">// 外層迴圈：每輪至少合併一半的 Component</text:p>
            <text:p text:style-name="P83">// 最多跑 log V 輪（因為每輪 Component 數量至少減半）</text:p>
            <text:p text:style-name="P80">while ((int)mst.size() &lt; n - 1) {</text:p>
            <text:p text:style-name="P82"/>
            <text:p text:style-name="P83">// cheapest[i]：component i 目前找到的最便宜外連邊的索引</text:p>
            <text:p text:style-name="P83">// -1 表示還沒找到任何外連邊</text:p>
            <text:p text:style-name="P80">vector&lt;int&gt; cheapest(n, -1);</text:p>
            <text:p text:style-name="P82"/>
            <text:p text:style-name="P81">// ── 步驟①：所有 Component 同時掃描所有邊 ──────────</text:p>
            <text:p text:style-name="P80">for (int i = 0; i &lt; (int)edges.size(); i++) {</text:p>
            <text:p text:style-name="P80">int ru = uf.find(edges[i].u); // u 的 component 代表</text:p>
            <text:p text:style-name="P80">int rv = uf.find(edges[i].v); // v 的 component 代表</text:p>
            <text:p text:style-name="P82"/>
            <text:p text:style-name="P80">if (ru == rv) continue; // 兩端同 component，不是外連邊</text:p>
            <text:p text:style-name="P82"/>
            <text:p text:style-name="P83">// 這條邊是「外連邊」，看看能不能更新兩端的最便宜記錄</text:p>
            <text:p text:style-name="P83">// 如果目前沒有記錄，或這條比之前記錄的更便宜，就更新</text:p>
            <text:p text:style-name="P80">if (cheapest[ru]==-1 ||</text:p>
            <text:p text:style-name="P80">edges[i].w &lt; edges[cheapest[ru]].w)</text:p>
            <text:p text:style-name="P80">cheapest[ru] = i; // 更新 component ru 的最便宜外連邊</text:p>
            <text:p text:style-name="P82"/>
            <text:p text:style-name="P80">if (cheapest[rv]==-1 ||</text:p>
            <text:p text:style-name="P80">edges[i].w &lt; edges[cheapest[rv]].w)</text:p>
            <text:p text:style-name="P80">cheapest[rv] = i; // 更新 component rv 的最便宜外連邊</text:p>
            <text:p text:style-name="P80">}</text:p>
            <text:p text:style-name="P82"/>
            <text:p text:style-name="P81">// ── 步驟②：所有 Component 同時把最便宜外連邊加入 MST ─</text:p>
            <text:p text:style-name="P80">bool merged = false; // 這輪有沒有合併成功過</text:p>
            <text:p text:style-name="P80">for (int i = 0; i &lt; n; i++) {</text:p>
            <text:p text:style-name="P80">if (cheapest[i] == -1) continue; // 這個 component 無外連邊</text:p>
            <text:p text:style-name="P82"/>
            <text:p text:style-name="P80">auto&amp; e = edges[cheapest[i]]; // 取出這條最便宜的邊</text:p>
            <text:p text:style-name="P82"/>
            <text:p text:style-name="P83">// unite 再次確認是否真的不同組</text:p>
            <text:p text:style-name="P83">// （因為同一條邊可能被兩個 component 同時提名）</text:p>
            <text:p text:style-name="P80">if (uf.unite(e.u, e.v)) {</text:p>
            <text:p text:style-name="P80">mst.push_back(e); // 加入 MST</text:p>
            <text:p text:style-name="P80">total += e.w;</text:p>
            <text:p text:style-name="P80">merged = true;</text:p>
            <text:p text:style-name="P80">}</text:p>
            <text:p text:style-name="P80">}</text:p>
            <text:p text:style-name="P82"/>
            <text:p text:style-name="P83">// 如果這輪完全沒有合併，代表圖不連通，直接跳出</text:p>
            <text:p text:style-name="P80">if (!merged) break;</text:p>
            <text:p text:style-name="P80">}</text:p>
            <text:p text:style-name="P80">return {mst, total};</text:p>
            <text:p text:style-name="P80">}</text:p>
            <text:p text:style-name="P82"/>
            <text:p text:style-name="P81">// ── 測試程式 ─────────────────────────────────────────────────</text:p>
            <text:p text:style-name="P83">// 節點：A=0, B=1, C=2, D=3</text:p>
            <text:p text:style-name="P83">// 邊：AB=1, AD=4, BC=4, CD=2</text:p>
            <text:p text:style-name="P83">// 預期 MST：AB=1 + CD=2 + BC=4 = 7</text:p>
            <text:p text:style-name="P80">int main() {</text:p>
            <text:p text:style-name="P80">int n = 4;</text:p>
            <text:p text:style-name="P80">vector&lt;Edge&gt; edges = {</text:p>
            <text:p text:style-name="P80"><text:soft-page-break/>{0,1,1}, // AB=1</text:p>
            <text:p text:style-name="P80">{0,3,4}, // AD=4</text:p>
            <text:p text:style-name="P80">{1,2,4}, // BC=4</text:p>
            <text:p text:style-name="P80">{2,3,2} // CD=2</text:p>
            <text:p text:style-name="P80">};</text:p>
            <text:p text:style-name="P80">auto [mst, total] = sollin(n, edges);</text:p>
            <text:p text:style-name="P80">cout &lt;&lt; "MST 邊：\n";</text:p>
            <text:p text:style-name="P80">for (auto&amp; e : mst)</text:p>
            <text:p text:style-name="P80">cout &lt;&lt; e.u &lt;&lt; "-" &lt;&lt; e.v &lt;&lt; " 費用=" &lt;&lt; e.w &lt;&lt; "\n";</text:p>
            <text:p text:style-name="P80">cout &lt;&lt; "總權重：" &lt;&lt; total &lt;&lt; "\n"; // 應該是 7</text:p>
            <text:p text:style-name="P80">return 0;</text:p>
            <text:p text:style-name="P80">}</text:p>
          </table:table-cell>
        </table:table-row>
      </table:table>
      <text:p text:style-name="P6"/>
      <text:h text:style-name="P10" text:outline-level="2">5-5 為什麼 Sollin 適合分散式計算？</text:h>
      <text:p text:style-name="P6"/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94">Prim（必須一個中央節點主控）： <text:s text:c="3"/>Sollin（每台電腦各自計算）：</text:p>
            <text:p text:style-name="P94">中央節點 A <text:s text:c="24"/>電腦1 <text:s text:c="2"/>電腦2 <text:s text:c="2"/>電腦3 <text:s text:c="2"/>電腦4</text:p>
            <text:p text:style-name="P94"><text:s text:c="3"/>│ <text:s text:c="32"/>↓ <text:s text:c="6"/>↓ <text:s text:c="6"/>↓ <text:s text:c="6"/>↓</text:p>
            <text:p text:style-name="P94">一步步往外 <text:s text:c="23"/>各自找自己最短外連邊（同時進行！）</text:p>
            <text:p text:style-name="P94">只有一個節點在工作 <text:s text:c="18"/>↓ <text:s text:c="6"/>↓ <text:s text:c="6"/>↓ <text:s text:c="6"/>↓</text:p>
            <text:p text:style-name="P94">→ 無法平行化 <text:s text:c="22"/>統一回報 → 同時合併</text:p>
            <text:p text:style-name="P95"/>
            <text:p text:style-name="P94">Sollin 每輪所有 Component 同時計算，不需要一個中央控制點，</text:p>
            <text:p text:style-name="P94">因此特別適合 Google Maps 路網計算、超大規模網路拓樸分析。</text:p>
          </table:table-cell>
        </table:table-row>
      </table:table>
      <text:p text:style-name="P6"/>
      <text:p text:style-name="Standard"/>
      <text:h text:style-name="P10" text:outline-level="2">5-6 Sollin 時間複雜度 ── 逐步推導</text:h>
      <text:p text:style-name="P6"/>
      <table:table table:name="新增表格76" table:style-name="新增表格76">
        <table:table-column table:style-name="新增表格76.A"/>
        <table:table-row table:style-name="新增表格76.1">
          <table:table-cell table:style-name="新增表格76.A1" office:value-type="string">
            <text:p text:style-name="P11">結論：Sollin 時間複雜度 = O(E log V)</text:p>
            <text:p text:style-name="P8">核心關鍵：每一輪把 Component 數量至少減半，所以最多只跑 log V 輪。</text:p>
          </table:table-cell>
        </table:table-row>
      </table:table>
      <text:p text:style-name="P6"/>
      <table:table table:name="新增表格77" table:style-name="新增表格77">
        <table:table-column table:style-name="新增表格77.A"/>
        <table:table-row table:style-name="新增表格77.1">
          <table:table-cell table:style-name="新增表格77.A1" office:value-type="string">
            <text:p text:style-name="P7">【關鍵觀察一】每輪 Component 數量至少減半</text:p>
            <text:p text:style-name="P8"/>
            <text:p text:style-name="P8">初始：V 個 Component（每個節點自成一組）。</text:p>
            <text:p text:style-name="P8">每個 Component 都找一條最短外連邊，並與另一個 Component 合併。</text:p>
            <text:p text:style-name="P8"/>
            <text:p text:style-name="P36">最壞情況：每次剛好兩兩配對合併：</text:p>
            <text:p text:style-name="P8">輪次 0：V 個 Component（例如 V = 8）</text:p>
            <text:p text:style-name="P8">輪次 1：最多剩 V/2 個（例如 4 個）</text:p>
            <text:p text:style-name="P8">輪次 2：最多剩 V/4 個（例如 2 個）</text:p>
            <text:p text:style-name="P23">輪次 3：最多剩 V/8 個（例如 1 個）← 完成！</text:p>
            <text:p text:style-name="P8"/>
            <text:p text:style-name="P62">→ 最多只需要 ⌈log₂ V⌉ 輪就能全部合併完。</text:p>
          </table:table-cell>
        </table:table-row>
      </table:table>
      <text:p text:style-name="P6"/>
      <table:table table:name="新增表格78" table:style-name="新增表格78">
        <table:table-column table:style-name="新增表格78.A"/>
        <table:table-column table:style-name="新增表格78.B"/>
        <table:table-column table:style-name="新增表格78.C"/>
        <table:table-column table:style-name="新增表格78.D"/>
        <table:table-row table:style-name="新增表格78.1">
          <table:table-cell table:style-name="新增表格78.A1" office:value-type="string">
            <text:p text:style-name="P84">輪次</text:p>
          </table:table-cell>
          <table:table-cell table:style-name="新增表格78.A1" office:value-type="string">
            <text:p text:style-name="P84">Component 數量（上界）</text:p>
          </table:table-cell>
          <table:table-cell table:style-name="新增表格78.A1" office:value-type="string">
            <text:p text:style-name="P84">本輪操作</text:p>
          </table:table-cell>
          <table:table-cell table:style-name="新增表格78.A1" office:value-type="string">
            <text:p text:style-name="P84">本輪花費</text:p>
          </table:table-cell>
        </table:table-row>
        <table:table-row table:style-name="新增表格78.1">
          <table:table-cell table:style-name="新增表格78.A2" office:value-type="string">
            <text:p text:style-name="P8">第 1 輪</text:p>
          </table:table-cell>
          <table:table-cell table:style-name="新增表格78.A2" office:value-type="string">
            <text:p text:style-name="P8">V → ≤ V/2</text:p>
          </table:table-cell>
          <table:table-cell table:style-name="新增表格78.A2" office:value-type="string">
            <text:p text:style-name="P8">掃所有 E 條邊</text:p>
          </table:table-cell>
          <table:table-cell table:style-name="新增表格78.A2" office:value-type="string">
            <text:p text:style-name="P8">O(E)</text:p>
          </table:table-cell>
        </table:table-row>
        <table:table-row table:style-name="新增表格78.1">
          <table:table-cell table:style-name="新增表格78.A3" office:value-type="string">
            <text:p text:style-name="P8">第 2 輪<text:soft-page-break/></text:p>
          </table:table-cell>
          <table:table-cell table:style-name="新增表格78.A3" office:value-type="string">
            <text:p text:style-name="P8">≤ V/2 → ≤ V/4<text:soft-page-break/></text:p>
          </table:table-cell>
          <table:table-cell table:style-name="新增表格78.A3" office:value-type="string">
            <text:p text:style-name="P8">掃所有 E 條邊<text:soft-page-break/></text:p>
          </table:table-cell>
          <table:table-cell table:style-name="新增表格78.A3" office:value-type="string">
            <text:p text:style-name="P8">O(E)<text:soft-page-break/></text:p>
          </table:table-cell>
        </table:table-row>
        <table:table-row table:style-name="新增表格78.1">
          <table:table-cell table:style-name="新增表格78.A2" office:value-type="string">
            <text:p text:style-name="P8">第 k 輪</text:p>
          </table:table-cell>
          <table:table-cell table:style-name="新增表格78.A2" office:value-type="string">
            <text:p text:style-name="P8">≤ V/2^(k-1)</text:p>
          </table:table-cell>
          <table:table-cell table:style-name="新增表格78.A2" office:value-type="string">
            <text:p text:style-name="P8">掃所有 E 條邊</text:p>
          </table:table-cell>
          <table:table-cell table:style-name="新增表格78.A2" office:value-type="string">
            <text:p text:style-name="P8">O(E)</text:p>
          </table:table-cell>
        </table:table-row>
        <table:table-row table:style-name="新增表格78.1">
          <table:table-cell table:style-name="新增表格78.A3" office:value-type="string">
            <text:p text:style-name="P8">共幾輪？</text:p>
          </table:table-cell>
          <table:table-cell table:style-name="新增表格78.A3" office:value-type="string">
            <text:p text:style-name="P8">最多 log V 輪</text:p>
          </table:table-cell>
          <table:table-cell table:style-name="新增表格78.A3" office:value-type="string">
            <text:p text:style-name="P8">—</text:p>
          </table:table-cell>
          <table:table-cell table:style-name="新增表格78.A3" office:value-type="string">
            <text:p text:style-name="P8">—</text:p>
          </table:table-cell>
        </table:table-row>
        <table:table-row table:style-name="新增表格78.1">
          <table:table-cell table:style-name="新增表格78.A6" office:value-type="string">
            <text:p text:style-name="P33">總計</text:p>
          </table:table-cell>
          <table:table-cell table:style-name="新增表格78.A6" office:value-type="string">
            <text:p text:style-name="P33">—</text:p>
          </table:table-cell>
          <table:table-cell table:style-name="新增表格78.A6" office:value-type="string">
            <text:p text:style-name="P33">—</text:p>
          </table:table-cell>
          <table:table-cell table:style-name="新增表格78.A6" office:value-type="string">
            <text:p text:style-name="P33">log V 輪 × O(E) = O(E log V)</text:p>
          </table:table-cell>
        </table:table-row>
      </table:table>
      <text:p text:style-name="P6"/>
      <table:table table:name="新增表格79" table:style-name="新增表格79">
        <table:table-column table:style-name="新增表格79.A"/>
        <table:table-row table:style-name="新增表格79.1">
          <table:table-cell table:style-name="新增表格79.A1" office:value-type="string">
            <text:p text:style-name="P7">【關鍵觀察二】每一輪做什麼？花多少時間？</text:p>
            <text:p text:style-name="P8"/>
            <text:p text:style-name="P8">每一輪，所有 Component 同時找自己的最短外連邊，然後合併。</text:p>
            <text:p text:style-name="P8"/>
            <text:p text:style-name="P36">一輪裡的操作：</text:p>
            <text:p text:style-name="P8">① 掃描所有 E 條邊，替每個 Component 找最短外連邊 → O(E)</text:p>
            <text:p text:style-name="P8">② 把選出的邊加入 MST，合併 Component（Union-Find） → O(V α(V)) ≈ O(V)</text:p>
            <text:p text:style-name="P8">③ 因為連通圖必有 E ≥ V−1，而通常 E ≥ V（鏈狀圖例外），O(E) 主導 → 每輪花費 O(E)</text:p>
            <text:p text:style-name="P8"/>
            <text:p text:style-name="P23">→ 每輪 O(E)，共最多 log V 輪 → 總計 O(E log V)</text:p>
          </table:table-cell>
        </table:table-row>
      </table:table>
      <text:p text:style-name="P6"/>
      <table:table table:name="新增表格80" table:style-name="新增表格80">
        <table:table-column table:style-name="新增表格80.A"/>
        <table:table-row table:style-name="新增表格80.1">
          <table:table-cell table:style-name="新增表格80.A1" office:value-type="string">
            <text:p text:style-name="P25">用數字感受一下（V = 1024 的圖）：</text:p>
            <text:p text:style-name="P8"/>
            <text:p text:style-name="P8">初始： 1024 個 Component</text:p>
            <text:p text:style-name="P8">第 1 輪：最多 512 個</text:p>
            <text:p text:style-name="P8">第 2 輪：最多 256 個</text:p>
            <text:p text:style-name="P16">......</text:p>
            <text:p text:style-name="P23">第 10 輪：最多 1 個 → 完成！</text:p>
            <text:p text:style-name="P8"/>
            <text:p text:style-name="P8">log₂(1024) = 10，所以最多只需要 10 輪。</text:p>
            <text:p text:style-name="P62">每輪掃所有 E 條邊 → 總計 10 × E = O(E log V) 次操作。</text:p>
          </table:table-cell>
        </table:table-row>
      </table:table>
      <text:p text:style-name="P6"/>
      <table:table table:name="新增表格81" table:style-name="新增表格81">
        <table:table-column table:style-name="新增表格81.A"/>
        <table:table-row table:style-name="新增表格81.1">
          <table:table-cell table:style-name="新增表格81.A1" office:value-type="string">
            <text:p text:style-name="P7">與 Kruskal、Prim 的複雜度比較</text:p>
            <text:p text:style-name="P8"/>
            <text:p text:style-name="P8">Sollin O(E log V) vs Kruskal O(E log E) = O(E log V) → 相同！</text:p>
            <text:p text:style-name="P8">Sollin O(E log V) vs Prim Heap 版 O(E log V) → 相同！</text:p>
            <text:p text:style-name="P8"/>
            <text:p text:style-name="P36">那 Sollin 的優勢是什麼？</text:p>
            <text:p text:style-name="P8">每一輪的操作是「所有 Component 同時進行」，天然適合平行化。</text:p>
            <text:p text:style-name="P8">Prim 和 Kruskal 是序列演算法（一步一步），難以平行化。</text:p>
            <text:p text:style-name="P23">→ 分散式環境下，Sollin 每輪可分給多台電腦同時跑，</text:p>
            <text:p text:style-name="P23">大幅降低實際牆鐘時間（Wall-clock time）。</text:p>
          </table:table-cell>
        </table:table-row>
      </table:table>
      <text:p text:style-name="P6"/>
      <table:table table:name="新增表格82" table:style-name="新增表格82">
        <table:table-column table:style-name="新增表格82.A"/>
        <table:table-row table:style-name="新增表格82.1">
          <table:table-cell table:style-name="新增表格82.A1" office:value-type="string">
            <text:p text:style-name="P33">✅ 一句話記住 Sollin 複雜度</text:p>
            <text:p text:style-name="P8">每輪掃全部 E 條邊 O(E)，最多跑 log V 輪（每輪 Component 至少減半）→ O(E log V)。</text:p>
          </table:table-cell>
        </table:table-row>
      </table:table>
      <text:p text:style-name="P6"/>
      <text:p text:style-name="P8"><text:soft-page-break/><draw:frame draw:style-name="fr2" draw:name="Complexity_Sollin" text:anchor-type="as-char" svg:y="0cm" svg:width="16cm" svg:height="11.529cm" draw:z-index="5"><draw:image xlink:href="Pictures/1000000000000550000003D4BE568724.png" xlink:type="simple" xlink:show="embed" xlink:actuate="onLoad" draw:mime-type="image/png"/></draw:frame></text:p>
      <text:p text:style-name="P8"/>
      <text:h text:style-name="P9" text:outline-level="1">六、113閩 Q5 ── Kruskal 公職真題完整解題</text:h>
      <text:p text:style-name="P6"/>
      <text:h text:style-name="P10" text:outline-level="2">6-1 題目</text:h>
      <text:p text:style-name="P6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00">題目：</text:p>
            <text:p text:style-name="P100">圖 G 有 7 個節點：a, b, c, d, e, f, g</text:p>
            <text:p text:style-name="P100">所有邊（格式：節點─節點 = 權重）：</text:p>
            <text:p text:style-name="P100">a─b=13　　a─c=9　　a─d=10　　b─d=16　　c─d=12</text:p>
            <text:p text:style-name="P100">c─e=2　　　c─f=3　　　d─g=18　　　e─f=4　　　f─g=6</text:p>
            <text:p text:style-name="P95"/>
            <text:p text:style-name="P100">請用 Kruskal 演算法找出 MST 及總權重。</text:p>
          </table:table-cell>
        </table:table-row>
      </table:table>
      <text:p text:style-name="P6"/>
      <text:h text:style-name="P10" text:outline-level="2">6-2 先畫出圖的結構</text:h>
      <text:p text:style-name="P6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94">圖的連線示意（看懂這張圖，解題就簡單了）：</text:p>
            <text:p text:style-name="P94"><text:s text:c="13"/>b</text:p>
            <text:p text:style-name="P94"><text:s text:c="12"/>/ \</text:p>
            <text:p text:style-name="P94"><text:s text:c="10"/>13 <text:s text:c="2"/>16</text:p>
            <text:p text:style-name="P94"><text:s text:c="10"/>/ <text:s text:c="4"/>\</text:p>
            <text:p text:style-name="P94"><text:s text:c="9"/>a──10───d──18──g</text:p>
            <text:p text:style-name="P94"><text:s text:c="10"/>\ <text:s text:c="5"/>│ <text:s text:c="6"/>\</text:p>
            <text:p text:style-name="P94"><text:s text:c="11"/>9 <text:s text:c="3"/>12 <text:s text:c="7"/>6</text:p>
            <text:p text:style-name="P94"><text:s text:c="12"/>\ <text:s text:c="3"/>│ <text:s text:c="8"/>\</text:p>
            <text:p text:style-name="P94"><text:s text:c="13"/>c──3──f────6───+</text:p>
            <text:p text:style-name="P94"><text:s text:c="13"/>│ <text:s text:c="5"/>│</text:p>
            <text:p text:style-name="P94"><text:s text:c="13"/>2 <text:s text:c="5"/>4</text:p>
            <text:p text:style-name="P94"><text:s text:c="13"/>│ <text:s text:c="5"/>│</text:p>
            <text:p text:style-name="P94"><text:s text:c="13"/>e──────+</text:p>
            <text:p text:style-name="P95"/>
            <text:p text:style-name="P94">(c─e=2, e─f=4, c─f=3)</text:p>
            <text:p text:style-name="P94">注意：c 連著好幾條邊！c─e=2, c─f=3, c─d=12, a─c=9</text:p>
            <text:p text:style-name="P94"><text:s text:c="6"/>這些是解題時最容易混淆的地方，要特別注意。</text:p>
          </table:table-cell>
        </table:table-row>
      </table:table>
      <text:p text:style-name="P6"/>
      <text:h text:style-name="P10" text:outline-level="2">6-3 Step 1：所有邊排序</text:h>
      <text:p text:style-name="P6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94">10條邊，依權重由小到大排序：</text:p>
            <text:p text:style-name="P95"/>
            <text:p text:style-name="P94">排序 <text:s/>邊 <text:s text:c="10"/>權重 <text:s text:c="3"/>說明</text:p>
            <text:p text:style-name="P94">────────────────────────────────────────</text:p>
            <text:p text:style-name="P94"><text:s text:c="2"/>1 <text:s text:c="2"/>(c, e) <text:s text:c="8"/>2 <text:s text:c="3"/>← c 和 e 直接連，最便宜</text:p>
            <text:p text:style-name="P94"><text:s text:c="2"/>2 <text:s text:c="2"/>(c, f) <text:s text:c="8"/>3 <text:s text:c="3"/>← c 和 f 直接連</text:p>
            <text:p text:style-name="P94"><text:s text:c="2"/>3 <text:s text:c="2"/>(e, f) <text:s text:c="8"/>4 <text:s text:c="3"/>← e 和 f 直接連</text:p>
            <text:p text:style-name="P94"><text:s text:c="2"/>4 <text:s text:c="2"/>(f, g) <text:s text:c="8"/>6 <text:s text:c="3"/>← f 和 g 直接連</text:p>
            <text:p text:style-name="P94"><text:s text:c="2"/>5 <text:s text:c="2"/>(a, c) <text:s text:c="8"/>9 <text:s text:c="3"/>← a 和 c 直接連</text:p>
            <text:p text:style-name="P94"><text:s text:c="2"/>6 <text:s text:c="2"/>(a, d) <text:s text:c="7"/>10 <text:s text:c="3"/>← a 和 d 直接連</text:p>
            <text:p text:style-name="P94"><text:s text:c="2"/>7 <text:s text:c="2"/>(c, d) <text:s text:c="7"/>12 <text:s text:c="3"/>← c 和 d 直接連</text:p>
            <text:p text:style-name="P94"><text:s text:c="2"/>8 <text:s text:c="2"/>(a, b) <text:s text:c="7"/>13 <text:s text:c="3"/>← a 和 b 直接連</text:p>
            <text:p text:style-name="P94"><text:s text:c="2"/>9 <text:s text:c="2"/>(b, d) <text:s text:c="7"/>16</text:p>
            <text:p text:style-name="P94"><text:s/>10 <text:s text:c="2"/>(d, g) <text:s text:c="7"/>18 <text:s text:c="3"/>← 最貴</text:p>
          </table:table-cell>
        </table:table-row>
      </table:table>
      <text:p text:style-name="P6"/>
      <text:h text:style-name="P99" text:outline-level="2"><text:soft-page-break/><text:span text:style-name="T64">6-4 Step 2：逐條執行 Kruskal</text:span></text:h>
      <text:p text:style-name="P6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96">Step 1：加入 (c,e)=2</text:p>
            <text:p text:style-name="P46">Find(c)=c <text:s text:c="3"/>Find(e)=e <text:s text:c="3"/>← 不同集合，可以加！</text:p>
            <text:p text:style-name="P46">Union(c, e)</text:p>
            <text:p text:style-name="P46">集合狀態：{a} {b} {c,e} {d} {f} {g}</text:p>
            <text:p text:style-name="P46">已選邊（1條）：(c,e)=2</text:p>
            <text:p text:style-name="P46">目前 MST： <text:s/>c──2──e</text:p>
          </table:table-cell>
        </table:table-row>
      </table:table>
      <text:p text:style-name="P6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96">Step 2：加入 (c,f)=3</text:p>
            <text:p text:style-name="P46">Find(c)=c <text:s text:c="3"/>Find(f)=f <text:s text:c="3"/>← 不同集合，可以加！</text:p>
            <text:p text:style-name="P46">Union(c, f)</text:p>
            <text:p text:style-name="P46">集合狀態：{a} {b} {c,e,f} {d} {g}</text:p>
            <text:p text:style-name="P46">已選邊（2條）：(c,e)=2, (c,f)=3</text:p>
            <text:p text:style-name="P46">目前 MST： <text:s/>e──2──c──3──f</text:p>
          </table:table-cell>
        </table:table-row>
      </table:table>
      <text:p text:style-name="P6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97">Step 3：看 (e,f)=4 → ⛔ 跳過！</text:p>
            <text:p text:style-name="P46">Find(e)=c <text:s text:c="3"/>Find(f)=c <text:s text:c="3"/>← 相同集合！</text:p>
            <text:p text:style-name="P46">為什麼會同集合？</text:p>
            <text:p text:style-name="P46"><text:s text:c="2"/>上面把 c,e 合併成一組，又把 c,f 合併進來，</text:p>
            <text:p text:style-name="P46"><text:s text:c="2"/>所以 e、c、f 都在同一組了。</text:p>
            <text:p text:style-name="P46">若加入 e─f：</text:p>
            <text:p text:style-name="P46"><text:s text:c="2"/>e──2──c──3──f</text:p>
            <text:p text:style-name="P46"><text:s text:c="2"/>└───────4───┘ <text:s/>← 形成三角形迴路！</text:p>
            <text:p text:style-name="P46">⛔ 跳過 (e,f)=4</text:p>
          </table:table-cell>
        </table:table-row>
      </table:table>
      <text:p text:style-name="P6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96">Step 4：加入 (f,g)=6</text:p>
            <text:p text:style-name="P46">Find(f)=c <text:s text:c="3"/>Find(g)=g <text:s text:c="3"/>← 不同集合，可以加！</text:p>
            <text:p text:style-name="P46">Union(f, g)</text:p>
            <text:p text:style-name="P46">集合狀態：{a} {b} {c,e,f,g} {d}</text:p>
            <text:p text:style-name="P46">已選邊（3條）：(c,e)=2, (c,f)=3, (f,g)=6</text:p>
            <text:p text:style-name="P46">目前 MST： <text:s/>e──2──c──3──f──6──g</text:p>
          </table:table-cell>
        </table:table-row>
      </table:table>
      <text:p text:style-name="P6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96">Step 5：加入 (a,c)=9</text:p>
            <text:p text:style-name="P46">Find(a)=a <text:s text:c="3"/>Find(c)=c <text:s text:c="3"/>← 不同集合，可以加！</text:p>
            <text:p text:style-name="P46">Union(a, c)</text:p>
            <text:p text:style-name="P46">集合狀態：{a,c,e,f,g} {b} {d}</text:p>
            <text:p text:style-name="P46">已選邊（4條）：...+(a,c)=9</text:p>
            <text:p text:style-name="P46">目前 MST： <text:s text:c="4"/>a──9──c──3──f──6──g</text:p>
            <text:p text:style-name="P46"><text:s text:c="19"/>│</text:p>
            <text:p text:style-name="P46"><text:s text:c="19"/>2</text:p>
            <text:p text:style-name="P46"><text:s text:c="19"/>│</text:p>
            <text:p text:style-name="P46"><text:s text:c="19"/>e</text:p>
          </table:table-cell>
        </table:table-row>
      </table:table>
      <text:p text:style-name="P6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96">Step 6：加入 (a,d)=10</text:p>
            <text:p text:style-name="P46">Find(a)=a <text:s text:c="3"/>Find(d)=d <text:s text:c="3"/>← 不同集合，可以加！</text:p>
            <text:p text:style-name="P46">Union(a, d)</text:p>
            <text:p text:style-name="P46">集合狀態：{a,c,d,e,f,g} {b}</text:p>
            <text:p text:style-name="P46">已選邊（5條）：...+(a,d)=10</text:p>
            <text:p text:style-name="P46">目前 MST： <text:s text:c="4"/>d──10──a──9──c──3──f──6──g</text:p>
            <text:p text:style-name="P46"><text:s text:c="20"/>│ <text:s text:c="18"/>2</text:p>
            <text:p text:style-name="P46"><text:s text:c="20"/>│ <text:s text:c="18"/>│</text:p>
            <text:p text:style-name="P46"><text:s text:c="20"/>d <text:s text:c="18"/>e</text:p>
          </table:table-cell>
        </table:table-row>
      </table:table>
      <text:p text:style-name="P6"/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97">Step 7：看 (c,d)=12 → ⛔ 跳過！</text:p>
            <text:p text:style-name="P101"><text:soft-page-break/><text:span text:style-name="T63">Find(c)=a <text:s text:c="3"/>Find(d)=a <text:s text:c="3"/>← 相同集合！</text:span></text:p>
            <text:p text:style-name="P46">為什麼？</text:p>
            <text:p text:style-name="P46"><text:s text:c="2"/>步驟5：a 和 c 合併 → {a,c,...}</text:p>
            <text:p text:style-name="P46"><text:s text:c="2"/>步驟6：a 和 d 合併 → {a,c,d,...}</text:p>
            <text:p text:style-name="P46"><text:s text:c="2"/>現在 c 和 d 都在同一組了！</text:p>
            <text:p text:style-name="P46">若加入 c─d：c─a─d─c 形成三角形迴路！</text:p>
            <text:p text:style-name="P46">⛔ 跳過 (c,d)=12</text:p>
          </table:table-cell>
        </table:table-row>
      </table:table>
      <text:p text:style-name="P6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96">Step 8：加入 (a,b)=13 ← 最後一條！</text:p>
            <text:p text:style-name="P46">Find(a)=a <text:s text:c="3"/>Find(b)=b <text:s text:c="3"/>← 不同集合，可以加！</text:p>
            <text:p text:style-name="P46">Union(a, b)</text:p>
            <text:p text:style-name="P46">集合狀態：{a,b,c,d,e,f,g} <text:s/>← 所有節點都在同一組！</text:p>
            <text:p text:style-name="P46">已選邊（6條）= V-1 = 7-1 = 6 <text:s/>✅ <text:s/>完成！</text:p>
            <text:p text:style-name="P46">最終 MST：</text:p>
            <text:p text:style-name="P46"><text:s text:c="2"/>b──13──a──9──c──3──f──6──g</text:p>
            <text:p text:style-name="P46"><text:s text:c="9"/>│ <text:s text:c="3"/>│</text:p>
            <text:p text:style-name="P46"><text:s text:c="8"/>10 <text:s text:c="3"/>2</text:p>
            <text:p text:style-name="P46"><text:s text:c="9"/>│ <text:s text:c="3"/>│</text:p>
            <text:p text:style-name="P46"><text:s text:c="9"/>d <text:s text:c="3"/>e</text:p>
          </table:table-cell>
        </table:table-row>
      </table:table>
      <text:p text:style-name="P6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72">✅ 最終答案</text:p>
            <text:p text:style-name="P98">MST 邊集合：(c,e)=2, (c,f)=3, (f,g)=6, (a,c)=9, (a,d)=10, (a,b)=13</text:p>
            <text:p text:style-name="P74">總權重：2 + 3 + 6 + 9 + 10 + 13 = 43</text:p>
            <text:p text:style-name="P102">邊數驗證：V-1 = 7-1 = 6 條 <text:s/>✅</text:p>
            <text:p text:style-name="P74">跳過原因整理：</text:p>
            <text:p text:style-name="P103"><text:s text:c="2"/>(e,f)=4 → c、e、f 已同集合，加了 e─c─f─e 成三角形</text:p>
            <text:p text:style-name="P104"><text:s text:c="2"/>(c,d)=12 → c、d 已透過 a 相連，加了 c─a─d─c 成三角形</text:p>
          </table:table-cell>
        </table:table-row>
      </table:table>
      <text:p text:style-name="P6"/>
      <text:p text:style-name="Standard"/>
      <text:h text:style-name="P9" text:outline-level="1">七、考試速查卡 ── 最終背誦版</text:h>
      <text:p text:style-name="P6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1">⭐ Prim 三句口訣</text:p>
            <text:p text:style-name="P105">① 從任一節點出發，每次選「T 內 → T 外」最小邊。</text:p>
            <text:p text:style-name="P105">② 天然防止 Cycle，不需 Union-Find，也不需額外判斷。</text:p>
            <text:p text:style-name="P106">③ 矩陣版 O(V²)；Heap 版 O(E log V)。稠密圖用矩陣版更省。</text:p>
          </table:table-cell>
        </table:table-row>
      </table:table>
      <text:p text:style-name="P6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1">⭐ Kruskal 三句口訣</text:p>
            <text:p text:style-name="P105">① 所有邊排序（小→大），Union-Find 逐一判斷是否成環。</text:p>
            <text:p text:style-name="P105">② 同集合 → 跳過；不同集合 → 加入、合併。</text:p>
            <text:p text:style-name="P106">③ 時間複雜度 O(E log E)，稀疏圖（邊少）時效率最好。</text:p>
          </table:table-cell>
        </table:table-row>
      </table:table>
      <text:p text:style-name="P6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>⭐ Sollin 三句口訣</text:p>
            <text:p text:style-name="P105">① 每個 Component 同時找自己最短外連邊，全體同時合併。</text:p>
            <text:p text:style-name="P105">② 每輪至少合併一半，最多 log V 輪結束。</text:p>
            <text:p text:style-name="P106">③ 適合平行 / 分散式計算，時間複雜度 O(E log V)。</text:p>
          </table:table-cell>
        </table:table-row>
      </table:table>
      <text:p text:style-name="P6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11">⭐ MST 必背特性</text:p>
            <text:p text:style-name="P105">① V-1 條邊：少一條有孤立點；多一條必有迴路。</text:p>
            <text:p text:style-name="P105">② 無 Cycle：有環必有冗餘邊，去掉更輕。</text:p>
            <text:p text:style-name="P105">③ 連通圖才有 MST；不連通 → 最小擴張森林。</text:p>
            <text:p text:style-name="P106">④ Cut Property：任意把圖切成兩半，跨切割的最小邊必屬於某棵 MST；</text:p>
            <text:p text:style-name="P16">若該邊是跨越該 Cut 的唯一最小邊，則它必屬於所有 MST。</text:p>
          </table:table-cell>
        </table:table-row>
      </table:table>
      <text:p text:style-name="P6"/>
      <table:table table:name="表格60" table:style-name="表格60">
        <table:table-column table:style-name="表格60.A"/>
        <table:table-column table:style-name="表格60.B"/>
        <table:table-column table:style-name="表格60.C"/>
        <table:table-column table:style-name="表格60.D"/>
        <table:table-column table:style-name="表格60.E"/>
        <table:table-row table:style-name="表格60.1">
          <table:table-cell table:style-name="表格60.A1" office:value-type="string">
            <text:p text:style-name="P107">演算法</text:p>
          </table:table-cell>
          <table:table-cell table:style-name="表格60.A1" office:value-type="string">
            <text:p text:style-name="P107">出發點</text:p>
          </table:table-cell>
          <table:table-cell table:style-name="表格60.A1" office:value-type="string">
            <text:p text:style-name="P107">核心操作</text:p>
          </table:table-cell>
          <table:table-cell table:style-name="表格60.A1" office:value-type="string">
            <text:p text:style-name="P107">時間複雜度</text:p>
          </table:table-cell>
          <table:table-cell table:style-name="表格60.A1" office:value-type="string">
            <text:p text:style-name="P107">適合圖型</text:p>
          </table:table-cell>
        </table:table-row>
        <table:table-row table:style-name="表格60.1">
          <table:table-cell table:style-name="表格60.A2" office:value-type="string">
            <text:p text:style-name="P108">Prim</text:p>
          </table:table-cell>
          <table:table-cell table:style-name="表格60.A2" office:value-type="string">
            <text:p text:style-name="P108">任一節點</text:p>
          </table:table-cell>
          <table:table-cell table:style-name="表格60.A2" office:value-type="string">
            <text:p text:style-name="P108">T內→T外，選最小邊</text:p>
          </table:table-cell>
          <table:table-cell table:style-name="表格60.A2" office:value-type="string">
            <text:p text:style-name="P108">O(V²) / O(ElogV)</text:p>
          </table:table-cell>
          <table:table-cell table:style-name="表格60.A2" office:value-type="string">
            <text:p text:style-name="P108">稠密圖</text:p>
          </table:table-cell>
        </table:table-row>
        <table:table-row table:style-name="表格60.1">
          <table:table-cell table:style-name="表格60.A3" office:value-type="string">
            <text:p text:style-name="P108">Kruskal</text:p>
          </table:table-cell>
          <table:table-cell table:style-name="表格60.A3" office:value-type="string">
            <text:p text:style-name="P108">最小邊</text:p>
          </table:table-cell>
          <table:table-cell table:style-name="表格60.A3" office:value-type="string">
            <text:p text:style-name="P108">邊排序+Union-Find</text:p>
          </table:table-cell>
          <table:table-cell table:style-name="表格60.A3" office:value-type="string">
            <text:p text:style-name="P108">O(E log E)</text:p>
          </table:table-cell>
          <table:table-cell table:style-name="表格60.A3" office:value-type="string">
            <text:p text:style-name="P108">稀疏圖</text:p>
          </table:table-cell>
        </table:table-row>
        <table:table-row table:style-name="表格60.1">
          <table:table-cell table:style-name="表格60.A2" office:value-type="string">
            <text:p text:style-name="P108">Sollin</text:p>
          </table:table-cell>
          <table:table-cell table:style-name="表格60.A2" office:value-type="string">
            <text:p text:style-name="P108">所有節點同時</text:p>
          </table:table-cell>
          <table:table-cell table:style-name="表格60.A2" office:value-type="string">
            <text:p text:style-name="P108">各Component找最短外連邊</text:p>
          </table:table-cell>
          <table:table-cell table:style-name="表格60.A2" office:value-type="string">
            <text:p text:style-name="P108">O(E log V)</text:p>
          </table:table-cell>
          <table:table-cell table:style-name="表格60.A2" office:value-type="string">
            <text:p text:style-name="P108">平行/分散式</text:p>
          </table:table-cell>
        </table:table-row>
      </table:table>
      <text:p text:style-name="P6"/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1">113閩Q5 快速記憶</text:p>
            <text:p text:style-name="P109">跳過：(e,f)=4 → c,e,f 同集合 <text:s text:c="3"/>(c,d)=12 → c,d 已透過 a 相連</text:p>
            <text:p text:style-name="P110">MST：ce=2 + cf=3 + fg=6 + ac=9 + ad=10 + ab=13 = 43</text:p>
          </table:table-cell>
        </table:table-row>
      </table:table>
      <text:p text:style-name="P6"/>
      <text:p text:style-name="P6"/>
      <text:p text:style-name="P111">本筆記包含：名詞解釋 × 完整圖解 × 逐步推導 × C++程式實作 × 公職真題113閩Q5</text:p>
      <text:p text:style-name="P112">最小擴張樹 MST 完整考試筆記 <text:s/>v3.1（1-2章節改版）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353cm" style:contextual-spacing="false"/>
      <style:text-properties fo:color="#ffffff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82cm" style:contextual-spacing="false"/>
      <style:text-properties fo:color="#ffffff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padding-left="0cm" fo:padding-right="0cm" fo:padding-top="0cm" fo:padding-bottom="0.035cm" fo:border-left="none" fo:border-right="none" fo:border-top="none" fo:border-bottom="0.51pt solid #2e75b6">
        <style:tab-stops>
          <style:tab-stop style:position="13cm" style:type="right"/>
        </style:tab-stops>
      </style:paragraph-properties>
      <style:text-properties fo:color="#7f8c8d" loext:opacity="100%" style:font-name="Arial" fo:font-size="9pt" style:font-name-asian="Arial2" style:font-size-asian="9pt" style:font-name-complex="Arial2" style:font-size-complex="9pt"/>
    </style:style>
    <style:style style:name="MP2" style:family="paragraph" style:parent-style-name="Standard">
      <style:paragraph-properties fo:margin-top="0.141cm" fo:margin-bottom="0cm" style:contextual-spacing="false" fo:padding-left="0cm" fo:padding-right="0cm" fo:padding-top="0.035cm" fo:padding-bottom="0cm" fo:border-left="none" fo:border-right="none" fo:border-top="0.51pt solid #2e75b6" fo:border-bottom="none">
        <style:tab-stops>
          <style:tab-stop style:position="13cm" style:type="right"/>
        </style:tab-stops>
      </style:paragraph-properties>
    </style:style>
    <style:style style:name="MT1" style:family="text">
      <style:text-properties fo:color="#7f8c8d" loext:opacity="100%" style:font-name="Arial" fo:font-size="8pt" style:font-name-asian="Arial2" style:font-size-asian="8pt" style:font-name-complex="Arial2" style:font-size-complex="8pt"/>
    </style:style>
    <style:style style:name="MT2" style:family="text">
      <style:text-properties fo:color="#1f3864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【第15章】最小擴張樹 MST<text:tab/>最小擴張樹完整考試筆記 v5.0</text:p>
      </style:header>
      <style:footer>
        <text:p text:style-name="MP2"><text:span text:style-name="MT1">MST 完整筆記 v5.0<text:tab/>第 </text:span><text:span text:style-name="MT2"><text:page-number text:select-page="current">30</text:page-number></text:span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80</meta:editing-cycles>
    <meta:creation-date>2026-06-06T08:37:28.179000000</meta:creation-date>
    <dc:date>2026-06-07T14:11:13.589233300</dc:date>
    <meta:generator>LibreOffice/26.2.3.2$Windows_X86_64 LibreOffice_project/70e089b17412e4cb7773e41413306b17a2328c34</meta:generator>
    <meta:editing-duration>PT4H6M35S</meta:editing-duration>
    <meta:document-statistic meta:table-count="84" meta:image-count="6" meta:object-count="0" meta:page-count="30" meta:paragraph-count="1027" meta:word-count="11797" meta:character-count="25801" meta:non-whitespace-character-count="20718"/>
  </office:meta>
</office:document-meta>
</file>