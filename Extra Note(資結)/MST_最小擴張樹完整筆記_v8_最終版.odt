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8" style:family="table">
      <style:table-properties style:width="16.228cm" fo:margin-left="0.009cm" fo:margin-top="0cm" fo:margin-bottom="0cm" table:align="left" style:writing-mode="page"/>
    </style:style>
    <style:style style:name="表格18.A" style:family="table-column">
      <style:table-column-properties style:column-width="16.228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16.228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2.819cm"/>
    </style:style>
    <style:style style:name="表格26.B" style:family="table-column">
      <style:table-column-properties style:column-width="3.881cm"/>
    </style:style>
    <style:style style:name="表格26.C" style:family="table-column">
      <style:table-column-properties style:column-width="3.528cm"/>
    </style:style>
    <style:style style:name="表格26.D" style:family="table-column">
      <style:table-column-properties style:column-width="6.00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6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6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16.228cm"/>
    </style:style>
    <style:style style:name="表格28.1" style:family="table-row">
      <style:table-row-properties style:min-row-height="8.054cm" fo:keep-together="auto"/>
    </style:style>
    <style:style style:name="表格28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2.819cm"/>
    </style:style>
    <style:style style:name="表格29.B" style:family="table-column">
      <style:table-column-properties style:column-width="3.881cm"/>
    </style:style>
    <style:style style:name="表格29.C" style:family="table-column">
      <style:table-column-properties style:column-width="3.528cm"/>
    </style:style>
    <style:style style:name="表格29.D" style:family="table-column">
      <style:table-column-properties style:column-width="6.00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9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9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9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16.22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2.819cm"/>
    </style:style>
    <style:style style:name="表格31.B" style:family="table-column">
      <style:table-column-properties style:column-width="3.881cm"/>
    </style:style>
    <style:style style:name="表格31.C" style:family="table-column">
      <style:table-column-properties style:column-width="3.528cm"/>
    </style:style>
    <style:style style:name="表格31.D" style:family="table-column">
      <style:table-column-properties style:column-width="6.00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31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31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4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8.A4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8.A7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16.22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2.819cm"/>
    </style:style>
    <style:style style:name="表格48.B" style:family="table-column">
      <style:table-column-properties style:column-width="3.881cm"/>
    </style:style>
    <style:style style:name="表格48.C" style:family="table-column">
      <style:table-column-properties style:column-width="3.528cm"/>
    </style:style>
    <style:style style:name="表格48.D" style:family="table-column">
      <style:table-column-properties style:column-width="6.00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4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4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48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7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7.A3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16.228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2" style:family="table">
      <style:table-properties style:width="16.228cm" fo:margin-left="0.009cm" fo:margin-top="0cm" fo:margin-bottom="0cm" table:align="left" style:writing-mode="page"/>
    </style:style>
    <style:style style:name="表格62.A" style:family="table-column">
      <style:table-column-properties style:column-width="16.228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3" style:family="table">
      <style:table-properties style:width="16.228cm" fo:margin-left="0.009cm" fo:margin-top="0cm" fo:margin-bottom="0cm" table:align="left" style:writing-mode="page"/>
    </style:style>
    <style:style style:name="表格63.A" style:family="table-column">
      <style:table-column-properties style:column-width="16.228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4" style:family="table">
      <style:table-properties style:width="16.228cm" fo:margin-left="0.009cm" fo:margin-top="0cm" fo:margin-bottom="0cm" table:align="left" style:writing-mode="page"/>
    </style:style>
    <style:style style:name="表格64.A" style:family="table-column">
      <style:table-column-properties style:column-width="2.819cm"/>
    </style:style>
    <style:style style:name="表格64.B" style:family="table-column">
      <style:table-column-properties style:column-width="3.881cm"/>
    </style:style>
    <style:style style:name="表格64.C" style:family="table-column">
      <style:table-column-properties style:column-width="3.528cm"/>
    </style:style>
    <style:style style:name="表格64.D" style:family="table-column">
      <style:table-column-properties style:column-width="6.00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4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5" style:family="table">
      <style:table-properties style:width="16.228cm" fo:margin-left="0.009cm" fo:margin-top="0cm" fo:margin-bottom="0cm" table:align="left" style:writing-mode="page"/>
    </style:style>
    <style:style style:name="表格65.A" style:family="table-column">
      <style:table-column-properties style:column-width="16.228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6" style:family="table">
      <style:table-properties style:width="16.228cm" fo:margin-left="0.009cm" fo:margin-top="0cm" fo:margin-bottom="0cm" table:align="left" style:writing-mode="page"/>
    </style:style>
    <style:style style:name="表格66.A" style:family="table-column">
      <style:table-column-properties style:column-width="16.228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7" style:family="table">
      <style:table-properties style:width="16.228cm" fo:margin-left="0.009cm" fo:margin-top="0cm" fo:margin-bottom="0cm" table:align="left" style:writing-mode="page"/>
    </style:style>
    <style:style style:name="表格67.A" style:family="table-column">
      <style:table-column-properties style:column-width="16.228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8" style:family="table">
      <style:table-properties style:width="16.228cm" fo:margin-left="0.009cm" fo:margin-top="0cm" fo:margin-bottom="0cm" table:align="left" style:writing-mode="page"/>
    </style:style>
    <style:style style:name="表格68.A" style:family="table-column">
      <style:table-column-properties style:column-width="16.228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9" style:family="table">
      <style:table-properties style:width="16.228cm" fo:margin-left="0.009cm" fo:margin-top="0cm" fo:margin-bottom="0cm" table:align="left" style:writing-mode="page"/>
    </style:style>
    <style:style style:name="表格69.A" style:family="table-column">
      <style:table-column-properties style:column-width="16.228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70" style:family="table">
      <style:table-properties style:width="16.228cm" fo:margin-left="0.009cm" fo:margin-top="0cm" fo:margin-bottom="0cm" table:align="left" style:writing-mode="page"/>
    </style:style>
    <style:style style:name="表格70.A" style:family="table-column">
      <style:table-column-properties style:column-width="16.228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1" style:family="table">
      <style:table-properties style:width="16.228cm" fo:margin-left="0.009cm" fo:margin-top="0cm" fo:margin-bottom="0cm" table:align="left" style:writing-mode="page"/>
    </style:style>
    <style:style style:name="表格71.A" style:family="table-column">
      <style:table-column-properties style:column-width="16.228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2" style:family="table">
      <style:table-properties style:width="16.228cm" fo:margin-left="0.009cm" fo:margin-top="0cm" fo:margin-bottom="0cm" table:align="left" style:writing-mode="page"/>
    </style:style>
    <style:style style:name="表格72.A" style:family="table-column">
      <style:table-column-properties style:column-width="16.228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3" style:family="table">
      <style:table-properties style:width="16.228cm" fo:margin-left="0.009cm" fo:margin-top="0cm" fo:margin-bottom="0cm" table:align="left" style:writing-mode="page"/>
    </style:style>
    <style:style style:name="表格73.A" style:family="table-column">
      <style:table-column-properties style:column-width="16.22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4" style:family="table">
      <style:table-properties style:width="16.228cm" fo:margin-left="0.009cm" fo:margin-top="0cm" fo:margin-bottom="0cm" table:align="left" style:writing-mode="page"/>
    </style:style>
    <style:style style:name="表格74.A" style:family="table-column">
      <style:table-column-properties style:column-width="16.22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5" style:family="table">
      <style:table-properties style:width="16.228cm" fo:margin-left="0.009cm" fo:margin-top="0cm" fo:margin-bottom="0cm" table:align="left" style:writing-mode="page"/>
    </style:style>
    <style:style style:name="表格75.A" style:family="table-column">
      <style:table-column-properties style:column-width="16.228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6" style:family="table">
      <style:table-properties style:width="16.228cm" fo:margin-left="0.009cm" fo:margin-top="0cm" fo:margin-bottom="0cm" table:align="left" style:writing-mode="page"/>
    </style:style>
    <style:style style:name="表格76.A" style:family="table-column">
      <style:table-column-properties style:column-width="16.228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7" style:family="table">
      <style:table-properties style:width="16.228cm" fo:margin-left="0.009cm" fo:margin-top="0cm" fo:margin-bottom="0cm" table:align="left" style:writing-mode="page"/>
    </style:style>
    <style:style style:name="表格77.A" style:family="table-column">
      <style:table-column-properties style:column-width="16.228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8" style:family="table">
      <style:table-properties style:width="16.228cm" fo:margin-left="0.009cm" fo:margin-top="0cm" fo:margin-bottom="0cm" table:align="left" style:writing-mode="page"/>
    </style:style>
    <style:style style:name="表格78.A" style:family="table-column">
      <style:table-column-properties style:column-width="16.22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9" style:family="table">
      <style:table-properties style:width="16.228cm" fo:margin-left="0.009cm" fo:margin-top="0cm" fo:margin-bottom="0cm" table:align="left" style:writing-mode="page"/>
    </style:style>
    <style:style style:name="表格79.A" style:family="table-column">
      <style:table-column-properties style:column-width="16.228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80" style:family="table">
      <style:table-properties style:width="16.228cm" fo:margin-left="0.009cm" fo:margin-top="0cm" fo:margin-bottom="0cm" table:align="left" style:writing-mode="page"/>
    </style:style>
    <style:style style:name="表格80.A" style:family="table-column">
      <style:table-column-properties style:column-width="16.228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81" style:family="table">
      <style:table-properties style:width="16.228cm" fo:margin-left="0.009cm" fo:margin-top="0cm" fo:margin-bottom="0cm" table:align="left" style:writing-mode="page"/>
    </style:style>
    <style:style style:name="表格81.A" style:family="table-column">
      <style:table-column-properties style:column-width="16.228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82" style:family="table">
      <style:table-properties style:width="16.228cm" fo:margin-left="0.009cm" fo:margin-top="0cm" fo:margin-bottom="0cm" table:align="left" style:writing-mode="page"/>
    </style:style>
    <style:style style:name="表格82.A" style:family="table-column">
      <style:table-column-properties style:column-width="16.228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3" style:family="table">
      <style:table-properties style:width="16.228cm" fo:margin-left="0.009cm" fo:margin-top="0cm" fo:margin-bottom="0cm" table:align="left" style:writing-mode="page"/>
    </style:style>
    <style:style style:name="表格83.A" style:family="table-column">
      <style:table-column-properties style:column-width="16.228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84" style:family="table">
      <style:table-properties style:width="16.228cm" fo:margin-left="0.009cm" fo:margin-top="0cm" fo:margin-bottom="0cm" table:align="left" style:writing-mode="page"/>
    </style:style>
    <style:style style:name="表格84.A" style:family="table-column">
      <style:table-column-properties style:column-width="16.228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85" style:family="table">
      <style:table-properties style:width="16.228cm" fo:margin-left="0.009cm" fo:margin-top="0cm" fo:margin-bottom="0cm" table:align="left" style:writing-mode="page"/>
    </style:style>
    <style:style style:name="表格85.A" style:family="table-column">
      <style:table-column-properties style:column-width="2.469cm"/>
    </style:style>
    <style:style style:name="表格85.B" style:family="table-column">
      <style:table-column-properties style:column-width="2.822cm"/>
    </style:style>
    <style:style style:name="表格85.C" style:family="table-column">
      <style:table-column-properties style:column-width="4.233cm"/>
    </style:style>
    <style:style style:name="表格85.D" style:family="table-column">
      <style:table-column-properties style:column-width="3.524cm"/>
    </style:style>
    <style:style style:name="表格85.E" style:family="table-column">
      <style:table-column-properties style:column-width="3.1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8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8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86" style:family="table">
      <style:table-properties style:width="16.228cm" fo:margin-left="0.009cm" fo:margin-top="0cm" fo:margin-bottom="0cm" table:align="left" style:writing-mode="page"/>
    </style:style>
    <style:style style:name="表格86.A" style:family="table-column">
      <style:table-column-properties style:column-width="16.228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6" style:family="paragraph" style:parent-style-name="Standard">
      <style:paragraph-properties fo:margin-top="0cm" fo:margin-bottom="0.141cm" style:contextual-spacing="false" fo:text-align="left" style:justify-single-word="false"/>
    </style:style>
    <style:style style:name="P7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8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text-indent="0cm" style:auto-text-indent="false" fo:break-before="page" fo:background-color="#1f3864"/>
    </style:style>
    <style:style style:name="P9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text-indent="0cm" style:auto-text-indent="false" fo:background-color="#2e75b6"/>
    </style:style>
    <style:style style:name="P10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1" style:family="paragraph" style:parent-style-name="Standard">
      <style:paragraph-properties fo:margin-top="0.106cm" fo:margin-bottom="0.106cm" style:contextual-spacing="false" fo:text-align="left" style:justify-single-word="false"/>
    </style:style>
    <style:style style:name="P12" style:family="paragraph" style:parent-style-name="Standard">
      <style:paragraph-properties fo:margin-top="0.035cm" fo:margin-bottom="0.035cm" style:contextual-spacing="false" fo:text-align="center" style:justify-single-word="false"/>
    </style:style>
    <style:style style:name="P13" style:family="paragraph" style:parent-style-name="Standard">
      <style:paragraph-properties fo:margin-top="0.141cm" fo:margin-bottom="0.071cm" style:contextual-spacing="false" fo:text-align="left" style:justify-single-word="false"/>
    </style:style>
    <style:style style:name="P14" style:family="paragraph" style:parent-style-name="Standard">
      <style:paragraph-properties fo:margin-top="0cm" fo:margin-bottom="0.106cm" style:contextual-spacing="false" fo:text-align="left" style:justify-single-word="false"/>
    </style:style>
    <style:style style:name="P15" style:family="paragraph" style:parent-style-name="Standard">
      <style:paragraph-properties fo:margin-top="0.035cm" fo:margin-bottom="0.106cm" style:contextual-spacing="false" fo:text-align="left" style:justify-single-word="false"/>
    </style:style>
    <style:style style:name="P16" style:family="paragraph" style:parent-style-name="Standard">
      <style:paragraph-properties fo:margin-top="0.018cm" fo:margin-bottom="0.018cm" style:contextual-spacing="false" fo:text-align="left" style:justify-single-word="false"/>
    </style:style>
    <style:style style:name="P17" style:family="paragraph" style:parent-style-name="Standard">
      <style:paragraph-properties fo:margin-top="0.018cm" fo:margin-bottom="0.071cm" style:contextual-spacing="false" fo:text-align="left" style:justify-single-word="false"/>
    </style:style>
    <style:style style:name="P18" style:family="paragraph" style:parent-style-name="Standard">
      <style:paragraph-properties fo:margin-top="0.035cm" fo:margin-bottom="0.053cm" style:contextual-spacing="false" fo:text-align="left" style:justify-single-word="false"/>
    </style:style>
    <style:style style:name="P19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P20" style:family="paragraph" style:parent-style-name="Standard">
      <style:paragraph-properties fo:margin-left="0.635cm" fo:margin-top="0.018cm" fo:margin-bottom="0.018cm" style:contextual-spacing="false" fo:text-align="left" style:justify-single-word="false"/>
    </style:style>
    <style:style style:name="P21" style:family="paragraph" style:parent-style-name="Standard">
      <style:paragraph-properties fo:margin-left="0.635cm" fo:margin-top="0.018cm" fo:margin-bottom="0.071cm" style:contextual-spacing="false" fo:text-align="left" style:justify-single-word="false"/>
    </style:style>
    <style:style style:name="P22" style:family="paragraph" style:parent-style-name="Standard">
      <style:paragraph-properties fo:margin-top="0cm" fo:margin-bottom="0cm" style:contextual-spacing="false" fo:text-align="left" style:justify-single-word="false"/>
    </style:style>
    <style:style style:name="P23" style:family="paragraph" style:parent-style-name="Standard">
      <style:paragraph-properties fo:margin-left="1.411cm" fo:margin-top="0.018cm" fo:margin-bottom="0.018cm" style:contextual-spacing="false" fo:text-align="left" style:justify-single-word="false"/>
    </style:style>
    <style:style style:name="P24" style:family="paragraph" style:parent-style-name="Standard">
      <style:paragraph-properties fo:margin-top="0cm" fo:margin-bottom="0.071cm" style:contextual-spacing="false" fo:text-align="left" style:justify-single-word="false"/>
    </style:style>
    <style:style style:name="P25" style:family="paragraph" style:parent-style-name="Standard">
      <style:paragraph-properties fo:margin-top="0.035cm" fo:margin-bottom="0.071cm" style:contextual-spacing="false" fo:text-align="left" style:justify-single-word="false"/>
    </style:style>
    <style:style style:name="P26" style:family="paragraph" style:parent-style-name="Standard">
      <style:paragraph-properties fo:margin-top="0.071cm" fo:margin-bottom="0cm" style:contextual-spacing="false" fo:text-align="center" style:justify-single-word="false"/>
    </style:style>
    <style:style style:name="P27" style:family="paragraph" style:parent-style-name="Standard">
      <style:paragraph-properties fo:margin-top="0.035cm" fo:margin-bottom="0cm" style:contextual-spacing="false" fo:text-align="left" style:justify-single-word="false"/>
    </style:style>
    <style:style style:name="P28" style:family="paragraph" style:parent-style-name="Standard">
      <style:paragraph-properties fo:margin-top="0.035cm" fo:margin-bottom="0.106cm" style:contextual-spacing="false" fo:text-align="center" style:justify-single-word="false"/>
    </style:style>
    <style:style style:name="P2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30" style:family="paragraph" style:parent-style-name="Standard">
      <style:paragraph-properties fo:margin-top="0.071cm" fo:margin-bottom="0.071cm" style:contextual-spacing="false" fo:text-align="left" style:justify-single-word="false"/>
    </style:style>
    <style:style style:name="P31" style:family="paragraph" style:parent-style-name="Standard">
      <style:paragraph-properties fo:margin-left="0.635cm" fo:margin-top="0.071cm" fo:margin-bottom="0.071cm" style:contextual-spacing="false" fo:text-align="left" style:justify-single-word="false"/>
    </style:style>
    <style:style style:name="P32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33" style:family="paragraph" style:parent-style-name="Standard">
      <style:paragraph-properties fo:margin-top="0.009cm" fo:margin-bottom="0.053cm" style:contextual-spacing="false" fo:text-align="left" style:justify-single-word="false"/>
    </style:style>
    <style:style style:name="P34" style:family="paragraph" style:parent-style-name="Standard">
      <style:paragraph-properties fo:margin-top="0.009cm" fo:margin-bottom="0.035cm" style:contextual-spacing="false" fo:text-align="left" style:justify-single-word="false"/>
    </style:style>
    <style:style style:name="P35" style:family="paragraph" style:parent-style-name="Standard">
      <style:paragraph-properties fo:margin-top="0.035cm" fo:margin-bottom="0.071cm" style:contextual-spacing="false" fo:text-align="center" style:justify-single-word="false"/>
    </style:style>
    <style:style style:name="P36" style:family="paragraph" style:parent-style-name="Standard">
      <style:paragraph-properties fo:margin-top="0.035cm" fo:margin-bottom="0cm" style:contextual-spacing="false" fo:text-align="center" style:justify-single-word="false"/>
    </style:style>
    <style:style style:name="P37" style:family="paragraph" style:parent-style-name="Standard">
      <style:paragraph-properties fo:margin-top="0.014cm" fo:margin-bottom="0.014cm" style:contextual-spacing="false" fo:text-align="left" style:justify-single-word="false"/>
    </style:style>
    <style:style style:name="P38" style:family="paragraph" style:parent-style-name="Standard">
      <style:paragraph-properties fo:margin-top="0.106cm" fo:margin-bottom="0cm" style:contextual-spacing="false" fo:text-align="left" style:justify-single-word="false"/>
    </style:style>
    <style:style style:name="P39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>
      <style:paragraph-properties fo:margin-top="0.018cm" fo:margin-bottom="0cm" style:contextual-spacing="false" fo:text-align="left" style:justify-single-word="false"/>
    </style:style>
    <style:style style:name="P41" style:family="paragraph" style:parent-style-name="Standard">
      <style:paragraph-properties fo:margin-top="0.018cm" fo:margin-bottom="0.035cm" style:contextual-spacing="false" fo:text-align="left" style:justify-single-word="false"/>
    </style:style>
    <style:style style:name="P42" style:family="paragraph" style:parent-style-name="Standard">
      <style:paragraph-properties fo:margin-top="0.011cm" fo:margin-bottom="0.011cm" style:contextual-spacing="false"/>
    </style:style>
    <style:style style:name="P43" style:family="paragraph" style:parent-style-name="Standard">
      <style:paragraph-properties fo:margin-top="0.011cm" fo:margin-bottom="0.011cm" style:contextual-spacing="false"/>
      <style:text-properties fo:color="#546e7a" loext:opacity="100%" style:font-name="Courier New" fo:font-size="10pt" fo:font-style="normal" fo:font-weight="normal" fo:background-color="#1f3864" style:font-name-asian="Courier New1" style:font-size-asian="10pt" style:font-style-asian="normal" style:font-weight-asian="normal" style:font-name-complex="Courier New1" style:font-size-complex="10pt"/>
    </style:style>
    <style:style style:name="P44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45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1" style:font-size-asian="10pt" style:font-style-asian="normal" style:font-weight-asian="normal" style:font-name-complex="Courier New1" style:font-size-complex="10pt"/>
    </style:style>
    <style:style style:name="P46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paragraph-properties fo:margin-top="0.009cm" fo:margin-bottom="0cm" style:contextual-spacing="false" fo:text-align="left" style:justify-single-word="false"/>
    </style:style>
    <style:style style:name="P49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T1" style:family="text">
      <style:text-properties fo:color="#aeb6c0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aeb6c0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aeb6c0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ffffff" loext:opacity="100%" style:font-name="Arial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5" style:family="text">
      <style:text-properties fo:color="#ffffff" loext:opacity="100%" style:font-name="Arial" fo:font-size="26pt" fo:font-style="normal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6" style:family="text">
      <style:text-properties fo:color="#ffffff" loext:opacity="100%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7" style:family="text">
      <style:text-properties fo:color="#aeb6c0" loext:opacity="100%" style:font-name="Arial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color="#aeb6c0" loext:opacity="100%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9" style:family="text">
      <style:text-properties fo:color="#f9e79f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f9e79f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color="#f9e79f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aeb6c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aeb6c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aeb6c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1f3864" loext:opacity="100%" style:font-name="Arial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6" style:family="text">
      <style:text-properties fo:color="#1f3864" loext:opacity="100%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7" style:family="text">
      <style:text-properties fo:color="#1f3864" loext:opacity="100%" style:font-name="Arial" fo:font-size="11.5pt" fo:font-style="normal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" style:family="text"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" style:family="text">
      <style:text-properties fo:color="#000000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0" style:family="text">
      <style:text-properties fo:color="#000000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1" style:family="text">
      <style:text-properties fo:color="#ffffff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2" style:family="text">
      <style:text-properties fo:color="#ffffff" loext:opacity="100%" style:font-name="Arial" fo:font-size="18pt" fo:font-weight="bold" style:font-size-asian="18pt" style:font-weight-asian="bold" style:font-name-complex="Arial1" style:font-size-complex="18pt" style:font-weight-complex="bold"/>
    </style:style>
    <style:style style:name="T23" style:family="text">
      <style:text-properties fo:color="#ffffff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4" style:family="text">
      <style:text-properties fo:color="#ffffff" loext:opacity="100%" style:font-name="Arial" fo:font-size="14pt" fo:font-weight="bold" style:font-size-asian="14pt" style:font-weight-asian="bold" style:font-name-complex="Arial1" style:font-size-complex="14pt" style:font-weight-complex="bold"/>
    </style:style>
    <style:style style:name="T25" style:family="text">
      <style:text-properties fo:color="#1f3864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6" style:family="text">
      <style:text-properties fo:color="#1f3864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1f3864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8" style:family="text">
      <style:text-properties fo:color="#00000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9" style:family="text">
      <style:text-properties fo:color="#00000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1" style:family="text">
      <style:text-properties fo:color="#000000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2" style:family="text">
      <style:text-properties fo:color="#000000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3" style:family="text">
      <style:text-properties fo:color="#ff3d00" loext:opacity="100%" style:font-name="Arial" fo:font-size="11pt" fo:font-style="normal" fo:font-weight="bold" fo:background-color="#64ffda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color="#ffea00" loext:opacity="100%" style:font-name="Arial" fo:font-size="11pt" fo:font-style="normal" fo:font-weight="bold" fo:background-color="#3d5afe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5" style:family="text">
      <style:text-properties fo:color="#18ffff" loext:opacity="100%" style:font-name="Arial" fo:font-size="11.5pt" fo:font-style="normal" fo:font-weight="bold" fo:background-color="#d500f9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6" style:family="text">
      <style:text-properties fo:color="#18ffff" loext:opacity="100%" fo:font-size="11.5pt" fo:font-style="normal" fo:font-weight="bold" fo:background-color="#d500f9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7" style:family="text">
      <style:text-properties fo:color="#1de9b6" loext:opacity="100%" style:font-name="Arial" fo:font-size="11pt" fo:font-style="normal" fo:font-weight="bold" fo:background-color="#6d4c41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8" style:family="text">
      <style:text-properties fo:color="#1de9b6" loext:opacity="100%" fo:font-size="11pt" fo:font-style="normal" fo:font-weight="bold" fo:background-color="#6d4c41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9" style:family="text">
      <style:text-properties fo:color="#c6ff00" loext:opacity="100%" style:font-name="Arial" fo:font-size="11pt" fo:font-style="normal" fo:font-weight="bold" fo:background-color="#f50057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40" style:family="text">
      <style:text-properties fo:color="#c0392b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1" style:family="text">
      <style:text-properties fo:color="#c0392b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2" style:family="text">
      <style:text-properties fo:color="#c0392b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3" style:family="text"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4" style:family="text">
      <style:text-properties fo:color="#c0392b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5" style:family="text">
      <style:text-properties fo:color="#c0392b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6" style:family="text">
      <style:text-properties fo:color="#c0392b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7" style:family="text">
      <style:text-properties fo:color="#27ae6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8" style:family="text">
      <style:text-properties fo:color="#27ae6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9" style:family="text">
      <style:text-properties fo:color="#27ae6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0" style:family="text">
      <style:text-properties fo:color="#27ae6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1" style:family="text">
      <style:text-properties fo:color="#27ae6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2" style:family="text">
      <style:text-properties fo:color="#27ae6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3" style:family="text">
      <style:text-properties fo:color="#000000" loext:opacity="100%" style:font-name="Arial" fo:font-size="11pt" fo:font-style="normal" fo:font-weight="bold" fo:background-color="#ffd74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54" style:family="text">
      <style:text-properties fo:color="#e67e22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5" style:family="text">
      <style:text-properties fo:color="#e67e22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6" style:family="text">
      <style:text-properties fo:color="#e67e22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7" style:family="text">
      <style:text-properties fo:color="#c6ff00" loext:opacity="100%" fo:font-size="11pt" fo:font-style="normal" fo:font-weight="bold" fo:background-color="#f50057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8" style:family="text">
      <style:text-properties fo:color="#ff3d00" loext:opacity="100%" fo:font-size="11pt" fo:font-style="normal" fo:font-weight="bold" fo:background-color="#64ffda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9" style:family="text">
      <style:text-properties fo:color="#ffff00" loext:opacity="100%" style:font-name="Arial" fo:font-size="11pt" fo:font-style="normal" fo:font-weight="bold" fo:background-color="#ff1744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0" style:family="text">
      <style:text-properties fo:color="#ffff00" loext:opacity="100%" fo:font-size="11pt" fo:font-style="normal" fo:font-weight="bold" fo:background-color="#ff1744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1" style:family="text">
      <style:text-properties fo:color="#7f8c8d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2" style:family="text">
      <style:text-properties fo:color="#7f8c8d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3" style:family="text">
      <style:text-properties fo:color="#7f8c8d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4" style:family="text">
      <style:text-properties fo:color="#18ffff" loext:opacity="100%" style:font-name="Arial" fo:font-size="11pt" fo:font-style="normal" fo:font-weight="bold" fo:background-color="#d500f9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5" style:family="text">
      <style:text-properties fo:color="#18ffff" loext:opacity="100%" fo:font-size="11pt" fo:font-style="normal" fo:font-weight="bold" fo:background-color="#d500f9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6" style:family="text">
      <style:text-properties fo:color="#00000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7" style:family="text">
      <style:text-properties fo:color="#00000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8" style:family="text">
      <style:text-properties fo:color="#00000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9" style:family="text">
      <style:text-properties fo:color="#27ae60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0" style:family="text">
      <style:text-properties fo:color="#27ae6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1" style:family="text">
      <style:text-properties fo:color="#27ae6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72" style:family="text">
      <style:text-properties fo:color="#1f3864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3" style:family="text">
      <style:text-properties fo:color="#1f3864" loext:opacity="100%" style:font-name="Arial" fo:font-size="12pt" fo:font-style="normal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4" style:family="text">
      <style:text-properties fo:color="#1f3864" loext:opacity="100%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5" style:family="text">
      <style:text-properties fo:color="#18ffff" loext:opacity="100%" style:font-name="Arial" fo:font-size="12pt" fo:font-style="normal" fo:font-weight="bold" fo:background-color="#d500f9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76" style:family="text">
      <style:text-properties fo:color="#18ffff" loext:opacity="100%" fo:font-size="12pt" fo:font-style="normal" fo:font-weight="bold" fo:background-color="#d500f9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7" style:family="text">
      <style:text-properties fo:color="#ffea00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8" style:family="text">
      <style:text-properties fo:color="#ffea00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9" style:family="text">
      <style:text-properties fo:color="#000000" loext:opacity="100%" style:font-name="Arial" fo:font-size="11pt" fo:font-style="normal" fo:font-weight="bold" fo:background-color="#ffff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80" style:family="text">
      <style:text-properties fo:color="#000000" loext:opacity="100%" fo:font-size="11pt" fo:font-style="normal" fo:font-weight="bold" fo:background-color="#ffff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81" style:family="text">
      <style:text-properties fo:color="#1f3864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2" style:family="text">
      <style:text-properties fo:color="#1f3864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3" style:family="text">
      <style:text-properties fo:color="#1f3864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4" style:family="text">
      <style:text-properties fo:color="#c0392b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5" style:family="text">
      <style:text-properties fo:color="#c0392b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6" style:family="text">
      <style:text-properties fo:color="#c0392b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7" style:family="text">
      <style:text-properties fo:color="#1f3864" loext:opacity="100%" fo:font-size="12pt" fo:font-style="normal" fo:font-weight="bold" fo:background-color="#ffff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8" style:family="text">
      <style:text-properties fo:color="#ffd74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89" style:family="text">
      <style:text-properties fo:color="#c6ff0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90" style:family="text">
      <style:text-properties fo:color="#c6ff00" loext:opacity="100%" fo:font-size="12pt" fo:font-style="normal" fo:font-weight="bold" fo:background-color="#0000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91" style:family="text">
      <style:text-properties fo:color="#2e75b6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2" style:family="text">
      <style:text-properties fo:color="#2e75b6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3" style:family="text">
      <style:text-properties fo:color="#00000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4" style:family="text">
      <style:text-properties fo:color="#000000" loext:opacity="100%" style:font-name="Arial" fo:font-size="10.5pt" fo:font-style="normal" fo:font-weight="bold" fo:background-color="#c6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5" style:family="text">
      <style:text-properties fo:color="#000000" loext:opacity="100%" fo:font-size="10.5pt" fo:font-style="normal" fo:font-weight="bold" fo:background-color="#c6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6" style:family="text">
      <style:text-properties fo:color="#ff3d00" loext:opacity="100%" style:font-name="Arial" fo:font-size="10.5pt" fo:font-style="normal" fo:font-weight="bold" fo:background-color="#64ffda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7" style:family="text">
      <style:text-properties fo:color="#ff3d00" loext:opacity="100%" fo:font-size="10.5pt" fo:font-style="normal" fo:font-weight="bold" fo:background-color="#64ffda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8" style:family="text">
      <style:text-properties fo:color="#18ffff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9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00" style:family="text">
      <style:text-properties fo:color="#27ae6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1" style:family="text">
      <style:text-properties fo:color="#27ae60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2" style:family="text">
      <style:text-properties fo:color="#27ae60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3" style:family="text">
      <style:text-properties fo:color="#ffd740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4" style:family="text">
      <style:text-properties fo:color="#ffd740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5" style:family="text">
      <style:text-properties fo:color="#1de9b6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6" style:family="text">
      <style:text-properties fo:color="#1de9b6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7" style:family="text">
      <style:text-properties fo:color="#e040fb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8" style:family="text">
      <style:text-properties fo:color="#e040fb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9" style:family="text">
      <style:text-properties fo:color="#ffffff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0" style:family="text">
      <style:text-properties fo:color="#ffffff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11" style:family="text">
      <style:text-properties fo:color="#ffffff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2" style:family="text">
      <style:text-properties fo:color="#000000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3" style:family="text">
      <style:text-properties fo:color="#000000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4" style:family="text">
      <style:text-properties fo:color="#000000" loext:opacity="100%" style:font-name="Arial" fo:font-size="9pt" fo:font-style="normal" fo:font-weight="bold" fo:background-color="#ffd740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5" style:family="text">
      <style:text-properties fo:color="#000000" loext:opacity="100%" style:font-name="Arial" fo:font-size="9pt" fo:font-style="normal" fo:font-weight="bold" fo:background-color="#ffd740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6" style:family="text">
      <style:text-properties fo:color="#000000" loext:opacity="100%" style:font-name="Arial" fo:font-size="9pt" fo:font-style="normal" fo:font-weight="bold" fo:background-color="#1de9b6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7" style:family="text">
      <style:text-properties fo:color="#000000" loext:opacity="100%" style:font-name="Arial" fo:font-size="9pt" fo:font-style="normal" fo:font-weight="bold" fo:background-color="#1de9b6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8" style:family="text">
      <style:text-properties fo:color="#000000" loext:opacity="100%" style:font-name="Arial" fo:font-size="9pt" fo:font-style="normal" fo:font-weight="bold" fo:background-color="#e040fb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9" style:family="text">
      <style:text-properties fo:color="#000000" loext:opacity="100%" style:font-name="Arial" fo:font-size="9pt" fo:font-style="normal" fo:font-weight="bold" fo:background-color="#e040fb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0" style:family="text">
      <style:text-properties fo:color="#000000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1" style:family="text">
      <style:text-properties fo:color="#ff3d00" loext:opacity="100%" style:font-name="Arial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2" style:family="text">
      <style:text-properties fo:color="#ff3d00" loext:opacity="100%" style:font-name="Arial" fo:font-size="9pt" fo:font-style="normal" fo:font-weight="bold" fo:background-color="#64ffda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3" style:family="text">
      <style:text-properties fo:color="#ff3d00" loext:opacity="100%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4" style:family="text">
      <style:text-properties fo:color="#ffff00" loext:opacity="100%" style:font-name="Arial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5" style:family="text">
      <style:text-properties fo:color="#ffff00" loext:opacity="100%" style:font-name="Arial" fo:font-size="9pt" fo:font-style="normal" fo:font-weight="bold" fo:background-color="#ff1744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6" style:family="text">
      <style:text-properties fo:color="#ffff00" loext:opacity="100%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7" style:family="text">
      <style:text-properties fo:color="#2e75b6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8" style:family="text">
      <style:text-properties fo:color="#2e75b6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9" style:family="text">
      <style:text-properties fo:color="#2e75b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0" style:family="text">
      <style:text-properties fo:color="#18ffff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1" style:family="text">
      <style:text-properties fo:color="#18ffff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2" style:family="text">
      <style:text-properties fo:color="#ffff00" loext:opacity="100%" fo:font-size="11pt" fo:font-style="normal" fo:font-weight="bold" fo:background-color="#ff91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33" style:family="text">
      <style:text-properties fo:color="#ffff00" loext:opacity="100%" style:font-name="Arial" fo:font-size="11pt" fo:font-style="normal" fo:font-weight="bold" fo:background-color="#ff91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34" style:family="text">
      <style:text-properties fo:color="#00e67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5" style:family="text">
      <style:text-properties fo:color="#ffff00" loext:opacity="100%" style:font-name="Arial" fo:font-size="10.5pt" fo:font-style="normal" fo:font-weight="bold" fo:background-color="#ff91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6" style:family="text">
      <style:text-properties fo:color="#ffff00" loext:opacity="100%" fo:font-size="10.5pt" fo:font-style="normal" fo:font-weight="bold" fo:background-color="#ff91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7" style:family="text">
      <style:text-properties fo:color="#c6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8" style:family="text">
      <style:text-properties fo:color="#00000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9" style:family="text">
      <style:text-properties fo:color="#18ffff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0" style:family="text">
      <style:text-properties fo:color="#00e676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1" style:family="text">
      <style:text-properties fo:color="#00e676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2" style:family="text">
      <style:text-properties fo:color="#e67e22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3" style:family="text">
      <style:text-properties fo:color="#e67e22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4" style:family="text">
      <style:text-properties fo:color="#00000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5" style:family="text">
      <style:text-properties fo:color="#00000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6" style:family="text">
      <style:text-properties fo:color="#00000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7" style:family="text"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148" style:family="text">
      <style:text-properties fo:color="#ffff00" loext:opacity="100%" style:font-name="Arial" fo:font-size="10pt" fo:font-style="normal" fo:font-weight="bold" fo:background-color="#ff91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49" style:family="text">
      <style:text-properties fo:color="#ffff00" loext:opacity="100%" fo:font-size="10pt" fo:font-style="normal" fo:font-weight="bold" fo:background-color="#ff91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0" style:family="text"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51" style:family="text">
      <style:text-properties fo:color="#c6ff00" loext:opacity="100%" style:font-name="Arial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2" style:family="text">
      <style:text-properties fo:color="#c6ff00" loext:opacity="100%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3" style:family="text">
      <style:text-properties fo:color="#c6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4" style:family="text">
      <style:text-properties fo:color="#27ae60" loext:opacity="100%" fo:font-size="10pt" fo:font-style="normal" fo:font-weight="bold" fo:background-color="#ffea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5" style:family="text">
      <style:text-properties fo:color="#27ae60" loext:opacity="100%" style:font-name="Arial" fo:font-size="10pt" fo:font-style="normal" fo:font-weight="bold" fo:background-color="#ffea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56" style:family="text">
      <style:text-properties fo:color="#000000" loext:opacity="100%" fo:font-size="11pt" fo:font-style="normal" fo:font-weight="bold" fo:background-color="#ffd74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7" style:family="text">
      <style:text-properties fo:color="#ff4081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8" style:family="text">
      <style:text-properties fo:color="#ff4081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59" style:family="text">
      <style:text-properties fo:color="#1f3864" loext:opacity="100%" style:font-name="Arial" fo:font-size="12pt" fo:font-style="normal" fo:font-weight="bold" fo:background-color="#ffd74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160" style:family="text">
      <style:text-properties fo:color="#40c4ff" loext:opacity="100%" style:font-name="Arial" fo:font-size="12pt" fo:font-style="normal" fo:font-weight="bold" fo:background-color="#5d4037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161" style:family="text">
      <style:text-properties fo:color="#e040fb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62" style:family="text">
      <style:text-properties fo:color="#e040fb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63" style:family="text">
      <style:text-properties fo:color="#e040fb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64" style:family="text">
      <style:text-properties fo:color="#ff3d00" loext:opacity="100%" fo:font-size="10.5pt" fo:font-style="normal" fo:font-weight="bold" fo:background-color="#00e676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5" style:family="text">
      <style:text-properties fo:color="#ff3d00" loext:opacity="100%" style:font-name="Arial" fo:font-size="10.5pt" fo:font-style="normal" fo:font-weight="bold" fo:background-color="#00e676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6" style:family="text">
      <style:text-properties fo:color="#ffff00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7" style:family="text">
      <style:text-properties fo:color="#000000" loext:opacity="100%" fo:font-size="10.5pt" fo:font-style="normal" fo:font-weight="bold" fo:background-color="#18ffff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8" style:family="text">
      <style:text-properties fo:color="#18ffff" loext:opacity="100%" style:font-name="Arial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9" style:family="text">
      <style:text-properties fo:color="#e8eaf6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70" style:family="text">
      <style:text-properties fo:color="#ff3d00" loext:opacity="100%" style:font-name="Arial" fo:font-size="10.5pt" fo:font-style="normal" fo:font-weight="bold" fo:background-color="#76ff03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1" style:family="text">
      <style:text-properties fo:color="#e8eaf6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72" style:family="text">
      <style:text-properties fo:color="#ffe082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73" style:family="text">
      <style:text-properties fo:color="#ffe082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74" style:family="text">
      <style:text-properties fo:color="#546e7a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75" style:family="text">
      <style:text-properties fo:color="#69f0ae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76" style:family="text">
      <style:text-properties fo:color="#69f0ae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77" style:family="text">
      <style:text-properties fo:color="#ffffff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78" style:family="text">
      <style:text-properties fo:color="#ffffff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79" style:family="text">
      <style:text-properties fo:color="#18ffff" loext:opacity="100%" style:font-name="Arial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80" style:family="text">
      <style:text-properties fo:color="#18ffff" loext:opacity="100%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81" style:family="text">
      <style:text-properties fo:color="#ff3d00" loext:opacity="100%" style:font-name="Arial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82" style:family="text">
      <style:text-properties fo:color="#ff3d00" loext:opacity="100%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83" style:family="text">
      <style:text-properties fo:color="#2979ff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4" style:family="text">
      <style:text-properties fo:color="#76ff03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5" style:family="text">
      <style:text-properties fo:color="#76ff03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6" style:family="text">
      <style:text-properties fo:color="#ff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7" style:family="text">
      <style:text-properties fo:color="#76ff03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8" style:family="text">
      <style:text-properties fo:color="#76ff03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9" style:family="text">
      <style:text-properties fo:color="#27ae6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0" style:family="text">
      <style:text-properties fo:color="#27ae6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1" style:family="text">
      <style:text-properties fo:color="#27ae60" loext:opacity="100%" fo:font-size="10.5pt" fo:font-style="normal" fo:font-weight="bold" fo:background-color="#ffc4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2" style:family="text">
      <style:text-properties fo:color="#e67e22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3" style:family="text">
      <style:text-properties fo:color="#e67e22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4" style:family="text">
      <style:text-properties fo:color="#ff1744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5" style:family="text">
      <style:text-properties fo:color="#ff1744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6" style:family="text">
      <style:text-properties fo:color="#00e676" loext:opacity="100%" style:font-name="Arial" fo:font-size="10.5pt" fo:font-style="normal" fo:font-weight="bold" fo:background-color="#5d403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7" style:family="text">
      <style:text-properties fo:color="#2979ff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8" style:family="text">
      <style:text-properties fo:color="#2979ff" loext:opacity="100%" fo:font-size="10.5pt" fo:font-style="normal" fo:font-weight="bold" fo:background-color="#bcaaa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9" style:family="text">
      <style:text-properties fo:color="#f50057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0" style:family="text">
      <style:text-properties fo:color="#1f3864" loext:opacity="100%" fo:font-size="11.5pt" fo:font-style="normal" fo:font-weight="bold" fo:background-color="#ffff00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201" style:family="text">
      <style:text-properties fo:color="#ff3d00" loext:opacity="100%" style:font-name="Arial" fo:font-size="11.5pt" fo:font-style="normal" fo:font-weight="bold" fo:background-color="#64ffda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202" style:family="text">
      <style:text-properties fo:color="#ff3d00" loext:opacity="100%" fo:font-size="11.5pt" fo:font-style="normal" fo:font-weight="bold" fo:background-color="#64ffda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203" style:family="text">
      <style:text-properties fo:color="#ffd740" loext:opacity="100%" style:font-name="Arial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4" style:family="text">
      <style:text-properties fo:color="#ffd740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5" style:family="text">
      <style:text-properties fo:color="#ffd740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6" style:family="text">
      <style:text-properties fo:color="#76ff03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7" style:family="text">
      <style:text-properties fo:color="#76ff03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8" style:family="text">
      <style:text-properties fo:color="#00e676" loext:opacity="100%" fo:font-size="10.5pt" fo:font-style="normal" fo:font-weight="bold" fo:background-color="#5d403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9" style:family="text">
      <style:text-properties fo:color="#f50057" loext:opacity="100%" style:font-name="Arial" fo:font-size="10.5pt" fo:font-style="normal" fo:font-weight="bold" fo:background-color="#f8bbd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0" style:family="text">
      <style:text-properties fo:color="#f50057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1" style:family="text">
      <style:text-properties fo:color="#f50057" loext:opacity="100%" fo:font-size="10.5pt" fo:font-style="normal" fo:font-weight="bold" fo:background-color="#f8bbd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2" style:family="text">
      <style:text-properties fo:color="#ffd74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3" style:family="text">
      <style:text-properties fo:color="#ffd74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4" style:family="text">
      <style:text-properties fo:color="#ff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5" style:family="text">
      <style:text-properties fo:color="#000000" loext:opacity="100%" style:font-name="Arial" fo:font-size="10.5pt" fo:font-style="normal" fo:font-weight="bold" fo:background-color="#ffd74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6" style:family="text">
      <style:text-properties fo:color="#000000" loext:opacity="100%" fo:font-size="10.5pt" fo:font-style="normal" fo:font-weight="bold" fo:background-color="#ffd74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7" style:family="text">
      <style:text-properties fo:color="#76ff03" loext:opacity="100%" style:font-name="Arial" fo:font-size="10.5pt" fo:font-style="normal" fo:font-weight="bold" fo:background-color="#651fff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8" style:family="text">
      <style:text-properties fo:color="#76ff03" loext:opacity="100%" fo:font-size="10.5pt" fo:font-style="normal" fo:font-weight="bold" fo:background-color="#651fff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9" style:family="text">
      <style:text-properties fo:color="#1f3864" loext:opacity="100%" fo:font-size="12pt" fo:font-style="normal" fo:font-weight="bold" fo:background-color="#ffd74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20" style:family="text">
      <style:text-properties fo:color="#b2ff59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1" style:family="text">
      <style:text-properties fo:color="#00e676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2" style:family="text">
      <style:text-properties fo:color="#00e676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3" style:family="text">
      <style:text-properties fo:color="#00e676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4" style:family="text">
      <style:text-properties fo:color="#ffff00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5" style:family="text">
      <style:text-properties fo:color="#ff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6" style:family="text">
      <style:text-properties fo:color="#ffff0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7" style:family="text">
      <style:text-properties fo:color="#27ae60" loext:opacity="100%" style:font-name="Arial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28" style:family="text">
      <style:text-properties fo:color="#27ae60" loext:opacity="100%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29" style:family="text">
      <style:text-properties fo:color="#c6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30" style:family="text">
      <style:text-properties fo:color="#000000" loext:opacity="100%" style:font-name="Courier New" fo:font-size="9pt" fo:font-style="normal" fo:font-weight="bold" fo:background-color="#ffab40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1" style:family="text">
      <style:text-properties fo:color="#ffff00" loext:opacity="100%" style:font-name="Courier New" fo:font-size="9pt" fo:font-style="normal" fo:font-weight="bold" fo:background-color="#ff1744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2" style:family="text">
      <style:text-properties fo:color="#64ffda" loext:opacity="100%" style:font-name="Courier New" fo:font-size="9pt" fo:font-style="normal" fo:font-weight="bold" fo:background-color="#d500f9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3" style:family="text">
      <style:text-properties fo:color="#000000" loext:opacity="100%" style:font-name="Courier New" fo:font-size="9pt" fo:font-style="normal" fo:font-weight="bold" fo:background-color="#ffd740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4" style:family="text">
      <style:text-properties fo:color="#00e676" loext:opacity="100%" style:font-name="Courier New" fo:font-size="9pt" fo:font-style="normal" fo:font-weight="bold" fo:background-color="#5d4037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5" style:family="text">
      <style:text-properties fo:color="#c6ff00" loext:opacity="100%" style:font-name="Courier New" fo:font-size="9pt" fo:font-style="normal" fo:font-weight="bold" fo:background-color="#5d4037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6" style:family="text">
      <style:text-properties fo:color="#000000" loext:opacity="100%" style:font-name="Courier New" fo:font-size="9pt" fo:font-style="normal" fo:font-weight="bold" fo:background-color="#c6ff00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7" style:family="text">
      <style:text-properties fo:color="#ff3d00" loext:opacity="100%" style:font-name="Courier New" fo:font-size="9pt" fo:font-style="normal" fo:font-weight="bold" fo:background-color="#64ffda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8" style:family="text">
      <style:text-properties fo:color="#1de9b6" loext:opacity="100%" style:font-name="Courier New" fo:font-size="9pt" fo:font-style="normal" fo:font-weight="bold" fo:background-color="#000000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39" style:family="text">
      <style:text-properties fo:color="#000000" loext:opacity="100%" style:font-name="Courier New" fo:font-size="9pt" fo:font-style="normal" fo:font-weight="bold" fo:background-color="#1de9b6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40" style:family="text">
      <style:text-properties fo:color="#ff4081" loext:opacity="100%" style:font-name="Courier New" fo:font-size="9pt" fo:font-style="normal" fo:font-weight="bold" fo:background-color="#64ffda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41" style:family="text">
      <style:text-properties fo:color="#ffff00" loext:opacity="100%" style:font-name="Courier New" fo:font-size="9pt" fo:font-style="normal" fo:font-weight="bold" fo:background-color="#000000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42" style:family="text">
      <style:text-properties fo:color="#ffd740" loext:opacity="100%" style:font-name="Courier New" fo:font-size="9pt" fo:font-style="normal" fo:font-weight="bold" fo:background-color="#000000" loext:char-shading-value="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243" style:family="text">
      <style:text-properties fo:color="#2e75b6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4" style:family="text">
      <style:text-properties fo:color="#ffffff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45" style:family="text"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T246" style:family="text">
      <style:text-properties fo:color="#ffffff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247" style:family="text">
      <style:text-properties fo:color="#ffffff" loext:opacity="100%" style:font-name="Arial" fo:font-size="9.5pt" fo:font-style="normal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T248" style:family="text">
      <style:text-properties fo:color="#000000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49" style:family="text">
      <style:text-properties fo:color="#000000" loext:opacity="100%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50" style:family="text">
      <style:text-properties fo:color="#000000" loext:opacity="100%" style:font-name="Arial" fo:font-size="9.5pt" fo:font-style="normal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51" style:family="text">
      <style:text-properties fo:color="#7f8c8d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52" style:family="text">
      <style:text-properties fo:color="#7f8c8d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253" style:family="text">
      <style:text-properties fo:color="#7f8c8d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54" style:family="text">
      <style:text-properties fo:color="#1f3864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55" style:family="text">
      <style:text-properties fo:color="#1f3864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256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 loext:marker-style-name="T1"><text:span text:style-name="T2">第 </text:span><text:span text:style-name="T3">15 </text:span><text:span text:style-name="T2">章</text:span></text:p>
            <text:p text:style-name="P2" loext:marker-style-name="T4"><text:span text:style-name="T5">最小擴張樹 </text:span><text:span text:style-name="T6">MST</text:span></text:p>
            <text:p text:style-name="P3" loext:marker-style-name="T7"><text:span text:style-name="T8">Minimum Spanning Tree</text:span><text:span text:style-name="T7"/></text:p>
            <text:p text:style-name="P1" loext:marker-style-name="T9"><text:span text:style-name="T10">Prim <text:s/></text:span><text:span text:style-name="T11">／ <text:s/></text:span><text:span text:style-name="T10">Kruskal <text:s/></text:span><text:span text:style-name="T11">／ <text:s/></text:span><text:span text:style-name="T10">Sollin</text:span><text:span text:style-name="T11">（</text:span><text:span text:style-name="T10">Borůvka</text:span><text:span text:style-name="T11">）</text:span></text:p>
            <text:p text:style-name="P4" loext:marker-style-name="T12"><text:span text:style-name="T13">圖解 </text:span><text:span text:style-name="T14">× </text:span><text:span text:style-name="T13">逐步推導 </text:span><text:span text:style-name="T14">× </text:span><text:span text:style-name="T13">程式實作 </text:span><text:span text:style-name="T14">× </text:span><text:span text:style-name="T13">公職考試完整版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 loext:marker-style-name="T15"><text:span text:style-name="T16">📖 </text:span><text:span text:style-name="T17">本章學習地圖</text:span></text:p>
            <text:p text:style-name="P7" loext:marker-style-name="T18"><text:span text:style-name="T19">第一章：</text:span><text:span text:style-name="T20">MST </text:span><text:span text:style-name="T19">是什麼？基本概念 </text:span><text:span text:style-name="T20">+ </text:span><text:span text:style-name="T19">名詞解釋</text:span></text:p>
            <text:p text:style-name="P7" loext:marker-style-name="T18"><text:span text:style-name="T19">第二章：三種演算法快速比較表</text:span><text:span text:style-name="T18"/></text:p>
            <text:p text:style-name="P7" loext:marker-style-name="T18"><text:span text:style-name="T19">第三章：</text:span><text:span text:style-name="T20">Prim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四章：</text:span><text:span text:style-name="T20">Kruskal </text:span><text:span text:style-name="T19">演算法 ── 圖解 </text:span><text:span text:style-name="T20">+ Union-Find + C++ </text:span><text:span text:style-name="T19">程式碼</text:span></text:p>
            <text:p text:style-name="P7" loext:marker-style-name="T18"><text:span text:style-name="T19">第五章：</text:span><text:span text:style-name="T20">Sollin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六章：</text:span><text:span text:style-name="T20">113</text:span><text:span text:style-name="T19">閩 </text:span><text:span text:style-name="T20">Q5 </text:span><text:span text:style-name="T19">公職真題完整解題</text:span></text:p>
            <text:p text:style-name="P7" loext:marker-style-name="T18"><text:span text:style-name="T19">第七章：考試速查卡（背誦版）</text:span><text:span text:style-name="T18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一、</text:span><text:span text:style-name="T21">MST </text:span><text:span text:style-name="T22">基本概念 ── 新手從這裡開始</text:span></text:h>
      <text:p text:style-name="P5"/>
      <text:h text:style-name="P9" text:outline-level="2" loext:marker-style-name="T23"><text:span text:style-name="T23">1-1 </text:span><text:span text:style-name="T24">先搞懂名詞：圖、節點、邊、權重</text:span></text:h>
      <text:p text:style-name="P5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 loext:marker-style-name="T25"><text:span text:style-name="T26">📌 </text:span><text:span text:style-name="T27">新手名詞解釋（一定要先懂這些！）</text:span></text:p>
            <text:p text:style-name="P7"><text:span text:style-name="T28">圖（</text:span><text:span text:style-name="T29">Graph</text:span><text:span text:style-name="T28">）：</text:span><text:span text:style-name="T19">由「點」和「線」組成的一種資料結構。例如：城市地圖就是一個圖。</text:span></text:p>
            <text:p text:style-name="P7"><text:span text:style-name="T28">節點（</text:span><text:span text:style-name="T29">Node / Vertex</text:span><text:span text:style-name="T28">）：</text:span><text:span text:style-name="T19">圖裡面的每個點。例如：城市 </text:span><text:span text:style-name="T20">A</text:span><text:span text:style-name="T19">、</text:span><text:span text:style-name="T20">B</text:span><text:span text:style-name="T19">、</text:span><text:span text:style-name="T20">C</text:span><text:span text:style-name="T19">。</text:span></text:p>
            <text:p text:style-name="P7"><text:span text:style-name="T28">邊（</text:span><text:span text:style-name="T29">Edge</text:span><text:span text:style-name="T28">）：</text:span><text:span text:style-name="T19">連接兩個節點的線段。例如：</text:span><text:span text:style-name="T20">A </text:span><text:span text:style-name="T19">到 </text:span><text:span text:style-name="T20">B </text:span><text:span text:style-name="T19">的道路。</text:span></text:p>
            <text:p text:style-name="P7"><text:span text:style-name="T28">權重（</text:span><text:span text:style-name="T29">Weight</text:span><text:span text:style-name="T28">）：</text:span><text:span text:style-name="T19">邊上的數字，代表距離、費用、時間等。例如：</text:span><text:span text:style-name="T20">A </text:span><text:span text:style-name="T19">到 </text:span><text:span text:style-name="T20">B </text:span><text:span text:style-name="T19">要走 </text:span><text:span text:style-name="T20">3 </text:span><text:span text:style-name="T19">公里。</text:span></text:p>
            <text:p text:style-name="P10"><text:span text:style-name="T28">連通圖（</text:span><text:span text:style-name="T29">Connected Graph</text:span><text:span text:style-name="T28">）：</text:span><text:span text:style-name="T19">任兩個節點之間都找得到路徑可以互達，不能有孤立點。</text:span></text:p>
          </table:table-cell>
        </table:table-row>
      </table:table>
      <text:p text:style-name="P5"/>
      <text:h text:style-name="P9" text:outline-level="2" loext:marker-style-name="T23"><text:span text:style-name="T23">1-2 MST </text:span><text:span text:style-name="T24">的定義</text:span></text:h>
      <text:p text:style-name="P5"/>
      <text:p text:style-name="P11" loext:marker-style-name="T30"><text:span text:style-name="T31">想像你要在 </text:span><text:span text:style-name="T32">4 </text:span><text:span text:style-name="T31">個城市之間鋪設電纜，每兩個城市之間都可以連線，但每條線有建設費用。你想「</text:span><text:span text:style-name="T33">用最低費用</text:span><text:span text:style-name="T31">，</text:span><text:span text:style-name="T34">讓每個城市都連通</text:span><text:span text:style-name="T31">」── 這就是 </text:span><text:span text:style-name="T32">MST </text:span><text:span text:style-name="T31">要解決的問題！</text:span></text:p>
      <text:p text:style-name="P5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 loext:marker-style-name="T15"><text:span text:style-name="T16">MST</text:span><text:span text:style-name="T17">（最小生成樹）</text:span><text:span text:style-name="T16">= </text:span><text:span text:style-name="T17">生成樹（</text:span><text:span text:style-name="T16">Spanning Tree</text:span><text:span text:style-name="T17">）</text:span><text:span text:style-name="T16">+ </text:span><text:span text:style-name="T35">總權重最小（</text:span><text:span text:style-name="T36">Minimum</text:span><text:span text:style-name="T35">）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1</text:span><text:span text:style-name="T27">：</text:span><text:span text:style-name="T37">覆蓋所有節點（</text:span><text:span text:style-name="T38">Spanning</text:span><text:span text:style-name="T37">）</text:span></text:p>
      <text:p text:style-name="P14" loext:marker-style-name="T30"><text:span text:style-name="T39">每個城市都必須被電纜接到</text:span><text:span text:style-name="T31">，不能有孤立的城市存在。</text:span>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5" loext:marker-style-name="T40"><text:span text:style-name="T41">❌ </text:span><text:span text:style-name="T42">不是生成樹</text:span></text:p>
            <text:p text:style-name="P16" loext:marker-style-name="T43"><text:span text:style-name="T43">A──B</text:span><text:span text:style-name="T43"/></text:p>
            <text:p text:style-name="P17" loext:marker-style-name="T43"><text:span text:style-name="T43"><text:s text:c="4"/>C──D</text:span><text:span text:style-name="T43"/></text:p>
            <text:p text:style-name="P5" loext:marker-style-name="T44"><text:span text:style-name="T45">A</text:span><text:span text:style-name="T46">、</text:span><text:span text:style-name="T45">B </text:span><text:span text:style-name="T46">一組，</text:span><text:span text:style-name="T45">C</text:span><text:span text:style-name="T46">、</text:span><text:span text:style-name="T45">D </text:span><text:span text:style-name="T46">另一組，無法互通。</text:span></text:p>
          </table:table-cell>
          <table:table-cell table:style-name="表格5.B1" office:value-type="string">
            <text:p text:style-name="P15" loext:marker-style-name="T47"><text:span text:style-name="T48">✅ </text:span><text:span text:style-name="T49">覆蓋所有節點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</text:span><text:span text:style-name="T43"/></text:p>
            <text:p text:style-name="P17" loext:marker-style-name="T43"><text:span text:style-name="T43">C──D</text:span><text:span text:style-name="T43"/></text:p>
            <text:p text:style-name="P5" loext:marker-style-name="T50"><text:span text:style-name="T51">A</text:span><text:span text:style-name="T52">、</text:span><text:span text:style-name="T51">B</text:span><text:span text:style-name="T52">、</text:span><text:span text:style-name="T51">C</text:span><text:span text:style-name="T52">、</text:span><text:span text:style-name="T51">D </text:span><text:span text:style-name="T52">全部被電纜接到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2</text:span><text:span text:style-name="T27">：</text:span><text:span text:style-name="T37">不能有迴路（</text:span><text:span text:style-name="T38">Cycle</text:span><text:span text:style-name="T37">）</text:span></text:p>
      <text:p text:style-name="P14" loext:marker-style-name="T30"><text:span text:style-name="T31">電纜不能繞成圈。</text:span><text:span text:style-name="T53">只要有迴路，就代表有一條邊是多餘的</text:span><text:span text:style-name="T31">、可以省去的。</text:span>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5" loext:marker-style-name="T40"><text:span text:style-name="T41">❌ </text:span><text:span text:style-name="T42">有迴路，不合法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 <text:s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44"><text:span text:style-name="T45">A→B→C→D→A </text:span><text:span text:style-name="T46">可以繞一圈，形成 </text:span><text:span text:style-name="T45">Cycle</text:span><text:span text:style-name="T46">。</text:span></text:p>
          </table:table-cell>
          <table:table-cell table:style-name="表格6.B1" office:value-type="string">
            <text:p text:style-name="P15" loext:marker-style-name="T47"><text:span text:style-name="T48">✅ </text:span><text:span text:style-name="T49">去掉一條，仍連通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<text:s text:c="3"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50"><text:span text:style-name="T52">移除最貴的邊，四個城市依然可以互達。</text:span><text:span text:style-name="T50"/></text:p>
          </table:table-cell>
        </table:table-row>
      </table:table>
      <text:p text:style-name="P5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4" loext:marker-style-name="T54"><text:span text:style-name="T55">為什麼有迴路的圖一定不能是生成樹（更不能是 </text:span><text:span text:style-name="T56">MST</text:span><text:span text:style-name="T55">）？</text:span></text:p>
            <text:p text:style-name="P18" loext:marker-style-name="T30"><text:span text:style-name="T31">根本原因：</text:span><text:span text:style-name="T39">生成樹的定義要求「無 </text:span><text:span text:style-name="T57">Cycle</text:span><text:span text:style-name="T39">」</text:span><text:span text:style-name="T31">。</text:span><text:span text:style-name="T33">有迴路的連通圖不是 </text:span><text:span text:style-name="T58">Tree</text:span><text:span text:style-name="T33">，所以直接不符合生成樹的定義</text:span><text:span text:style-name="T31">。</text:span></text:p>
            <text:p text:style-name="P19" loext:marker-style-name="T18"/>
            <text:p text:style-name="P20" loext:marker-style-name="T30"><text:span text:style-name="T31">進一步說明（以 </text:span><text:span text:style-name="T32">A─B─C─A </text:span><text:span text:style-name="T31">三角形為例）：</text:span></text:p>
            <text:p text:style-name="P20" loext:marker-style-name="T30"><text:span text:style-name="T32">• </text:span><text:span text:style-name="T31">去掉其中任何一條邊，三個城市仍然透過另外兩條邊互通</text:span></text:p>
            <text:p text:style-name="P21" loext:marker-style-name="T30"><text:span text:style-name="T32">• </text:span><text:span text:style-name="T31">刪掉最貴那條邊後，費用更低且連通性不變</text:span></text:p>
            <text:p text:style-name="P21" loext:marker-style-name="T30"><text:span text:style-name="T32">• </text:span><text:span text:style-name="T31">所以</text:span><text:span text:style-name="T59">有 </text:span><text:span text:style-name="T60">Cycle </text:span><text:span text:style-name="T59">的圖裡，至少有一條邊是「可以刪掉且不影響連通」的多餘邊</text:span></text:p>
            <text:p text:style-name="P19" loext:marker-style-name="T18"/>
            <text:p text:style-name="P22" loext:marker-style-name="T54"><text:soft-page-break/><text:span text:style-name="T56">➡ </text:span><text:span text:style-name="T55">有迴路 </text:span><text:span text:style-name="T56">= </text:span><text:span text:style-name="T55">不是生成樹 </text:span><text:span text:style-name="T56">= </text:span><text:span text:style-name="T55">一定不是 </text:span><text:span text:style-name="T56">MST</text:span></text:p>
            <text:p text:style-name="P23" loext:marker-style-name="T61"><text:span text:style-name="T62">（不是因為「費用一定更高」，而是因為根本不符合 </text:span><text:span text:style-name="T63">Tree </text:span><text:span text:style-name="T62">的定義）</text:span></text:p>
          </table:table-cell>
        </table:table-row>
      </table:table>
      <text:p text:style-name="P5"/>
      <text:p text:style-name="P13" loext:marker-style-name="T25"><text:span text:style-name="T27">由以上兩個條件推出的重要結論：</text:span><text:span text:style-name="T64">邊數一定是 </text:span><text:span text:style-name="T65">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4" loext:marker-style-name="T30"><text:span text:style-name="T31">「</text:span><text:span text:style-name="T32">V−1 </text:span><text:span text:style-name="T31">條邊」不是第三個獨立條件，而是由「覆蓋所有節點 </text:span><text:span text:style-name="T32">+ </text:span><text:span text:style-name="T31">無 </text:span><text:span text:style-name="T32">Cycle</text:span><text:span text:style-name="T31">」自然推導出來的結果。</text:span></text:p>
            <text:p text:style-name="P24" loext:marker-style-name="T66"><text:span text:style-name="T67">對 </text:span><text:span text:style-name="T68">V </text:span><text:span text:style-name="T67">個節點而言：</text:span></text:p>
          </table:table-cell>
        </table:table-row>
      </table:table>
      <text:p text:style-name="P5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5" loext:marker-style-name="T40"><text:span text:style-name="T42">邊數 </text:span><text:span text:style-name="T41">&lt; V−1 <text:s/>→ <text:s/></text:span><text:span text:style-name="T42">一定不連通</text:span></text:p>
            <text:p text:style-name="P25" loext:marker-style-name="T30"><text:span text:style-name="T31">例：</text:span><text:span text:style-name="T32">4 </text:span><text:span text:style-name="T31">個城市，只有 </text:span><text:span text:style-name="T32">2 </text:span><text:span text:style-name="T31">條邊：</text:span></text:p>
            <text:p text:style-name="P17" loext:marker-style-name="T43"><text:span text:style-name="T43">A──B <text:s text:c="4"/>C──D</text:span><text:span text:style-name="T43"/></text:p>
            <text:p text:style-name="P16" loext:marker-style-name="T30"><text:span text:style-name="T32">A</text:span><text:span text:style-name="T31">、</text:span><text:span text:style-name="T32">B </text:span><text:span text:style-name="T31">是一組，</text:span><text:span text:style-name="T32">C</text:span><text:span text:style-name="T31">、</text:span><text:span text:style-name="T32">D </text:span><text:span text:style-name="T31">是另一組，永遠無法互達。</text:span></text:p>
          </table:table-cell>
          <table:table-cell table:style-name="表格9.A1" office:value-type="string">
            <text:p text:style-name="P15" loext:marker-style-name="T40"><text:span text:style-name="T42">邊數 </text:span><text:span text:style-name="T41">&gt; V−1 <text:s/>→ <text:s/></text:span><text:span text:style-name="T42">一定有 </text:span><text:span text:style-name="T41">Cycle</text:span></text:p>
            <text:p text:style-name="P25" loext:marker-style-name="T30"><text:span text:style-name="T31">例：</text:span><text:span text:style-name="T32">4 </text:span><text:span text:style-name="T31">個城市，有 </text:span><text:span text:style-name="T32">4 </text:span><text:span text:style-name="T31">條邊：</text:span></text:p>
            <text:p text:style-name="P17" loext:marker-style-name="T43"><text:span text:style-name="T43">A──B <text:s/>| <text:s/>| <text:s/>D──C</text:span><text:span text:style-name="T43"/></text:p>
            <text:p text:style-name="P16" loext:marker-style-name="T30"><text:span text:style-name="T32">A→B→C→D→A </text:span><text:span text:style-name="T31">形成迴路，必定有多餘的邊。</text:span></text:p>
          </table:table-cell>
        </table:table-row>
      </table:table>
      <text:p text:style-name="P5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4" loext:marker-style-name="T69"><text:span text:style-name="T70">✅ </text:span><text:span text:style-name="T71">重要定理：</text:span></text:p>
            <text:p text:style-name="P12" loext:marker-style-name="T72"><text:span text:style-name="T73">「連通 </text:span><text:span text:style-name="T74">+ </text:span><text:span text:style-name="T73">無 </text:span><text:span text:style-name="T74">Cycle</text:span><text:span text:style-name="T73">」 <text:s/>⟺ <text:s/>「</text:span><text:span text:style-name="T75">恰好 </text:span><text:span text:style-name="T76">V−1 </text:span><text:span text:style-name="T75">條邊</text:span><text:span text:style-name="T73">」</text:span></text:p>
            <text:p text:style-name="P26" loext:marker-style-name="T18"><text:span text:style-name="T19">例：</text:span><text:span text:style-name="T20">4 </text:span><text:span text:style-name="T19">個節點，</text:span><text:span text:style-name="T77">MST </text:span><text:span text:style-name="T78">必有 </text:span><text:span text:style-name="T77">4−1 = 3 </text:span><text:span text:style-name="T78">條邊</text:span><text:span text:style-name="T19">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3</text:span><text:span text:style-name="T27">：</text:span><text:span text:style-name="T37">在所有生成樹中，選總權重最小的那棵（</text:span><text:span text:style-name="T38">Minimum</text:span><text:span text:style-name="T37">）</text:span></text:p>
      <text:p text:style-name="P14" loext:marker-style-name="T30"><text:span text:style-name="T79">滿足條件 </text:span><text:span text:style-name="T80">1 </text:span><text:span text:style-name="T79">和條件 </text:span><text:span text:style-name="T80">2 </text:span><text:span text:style-name="T79">的生成樹可能有很多棵</text:span><text:span text:style-name="T31">，</text:span><text:span text:style-name="T32">MST </text:span><text:span text:style-name="T31">要從中</text:span><text:span text:style-name="T39">選出總費用最低的那一棵</text:span><text:span text:style-name="T3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81"><text:span text:style-name="T82">舉例：</text:span><text:span text:style-name="T83">4 </text:span><text:span text:style-name="T82">個城市，邊的費用如下</text:span></text:p>
            <text:p text:style-name="P15" loext:marker-style-name="T43"><text:span text:style-name="T43">AB = 1，BD = 2，CD = 3，AC = 4</text:span><text:span text:style-name="T43"/></text:p>
            <text:p text:style-name="P5" loext:marker-style-name="T47"><text:span text:style-name="T49">方案 </text:span><text:span text:style-name="T48">A</text:span><text:span text:style-name="T49">：</text:span><text:span text:style-name="T48">AB + BD + CD = 1 + 2 + 3 = 6 <text:s/>✅ </text:span><text:span text:style-name="T49">費用最低，這就是 </text:span><text:span text:style-name="T48">MST</text:span></text:p>
            <text:p text:style-name="P27" loext:marker-style-name="T84"><text:span text:style-name="T85">方案 </text:span><text:span text:style-name="T86">B</text:span><text:span text:style-name="T85">：</text:span><text:span text:style-name="T86">AB + BD + AC = 1 + 2 + 4 = 7 <text:s/>❌ </text:span><text:span text:style-name="T85">雖然合法，但費用較高</text:span></text:p>
          </table:table-cell>
        </table:table-row>
      </table:table>
      <text:p text:style-name="P5"/>
      <text:p text:style-name="P13" loext:marker-style-name="T25"><text:span text:style-name="T27">一句話記憶 </text:span><text:span text:style-name="T26">&amp; </text:span><text:span text:style-name="T27">邏輯順序總結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8" loext:marker-style-name="T72"><text:span text:style-name="T87">MST</text:span><text:span text:style-name="T74"> = </text:span><text:span text:style-name="T88">覆蓋所有節點</text:span><text:span text:style-name="T73"> <text:s/></text:span><text:span text:style-name="T74">+ <text:s/></text:span><text:span text:style-name="T89">沒有 </text:span><text:span text:style-name="T90">Cycle</text:span><text:span text:style-name="T74"> <text:s/>+ <text:s/></text:span><text:span text:style-name="T75">總權重最小</text:span></text:p>
            <text:p text:style-name="P29" loext:marker-style-name="T91"><text:span text:style-name="T92">且一定具有：</text:span><text:span text:style-name="T33">邊數 </text:span><text:span text:style-name="T58">E = V − 1</text:span><text:span text:style-name="T92">（推論結果，非獨立條件）</text:span></text:p>
          </table:table-cell>
        </table:table-row>
      </table:table>
      <text:p text:style-name="P5"/>
      <text:p text:style-name="P30" loext:marker-style-name="T81"><text:span text:style-name="T82">正確的思考順序：</text:span><text:span text:style-name="T81"/></text:p>
      <text:p text:style-name="P31" loext:marker-style-name="T18"><text:span text:style-name="T20">① </text:span><text:span text:style-name="T93">覆蓋所有節點</text:span><text:span text:style-name="T19">（每個城市都要接到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② </text:span><text:span text:style-name="T94">不能有 </text:span><text:span text:style-name="T95">Cycle</text:span><text:span text:style-name="T19">（有環就有多餘的邊，去掉更省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③ </text:span><text:span text:style-name="T19">因此</text:span><text:span text:style-name="T96">邊數一定是 </text:span><text:span text:style-name="T97">V−1</text:span><text:span text:style-name="T19">（自然推導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④ </text:span><text:span text:style-name="T19">在所有符合以上條件的生成樹中，挑</text:span><text:span text:style-name="T98">總權重最小者</text:span></text:p>
      <text:p text:style-name="P23" loext:marker-style-name="T61"><text:span text:style-name="T63">↓</text:span><text:span text:style-name="T61"/></text:p>
      <text:p text:style-name="P31" loext:marker-style-name="T47"><text:span text:style-name="T48">✅ </text:span><text:span text:style-name="T49">就是 </text:span><text:span text:style-name="T48">MST</text:span></text:p>
      <text:p text:style-name="P5"/>
      <text:h text:style-name="P9" text:outline-level="2" loext:marker-style-name="T23"><text:span text:style-name="T23">1-3 </text:span><text:span text:style-name="T24">圖解：原始圖 </text:span><text:span text:style-name="T23">vs MST</text:span></text:h>
      <text:p text:style-name="P5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6" loext:marker-style-name="T99"><text:span text:style-name="T99">原始圖（所有邊）： <text:s text:c="18"/>MST（花最少錢連通所有城市）：</text:span><text:span text:style-name="T99"/></text:p>
            <text:p text:style-name="P32" loext:marker-style-name="T99"><text:soft-page-break/><text:span text:style-name="T99"><text:s text:c="9"/>A <text:s text:c="31"/>A</text:span><text:span text:style-name="T99"/></text:p>
            <text:p text:style-name="P32" loext:marker-style-name="T99"><text:span text:style-name="T99"><text:s text:c="8"/>/ \ <text:s text:c="29"/>/</text:span><text:span text:style-name="T99"/></text:p>
            <text:p text:style-name="P32" loext:marker-style-name="T99"><text:span text:style-name="T99"><text:s text:c="7"/>1 <text:s text:c="2"/>4 <text:s text:c="4"/>← 4條邊 <text:s text:c="14"/>1 <text:s text:c="5"/>← 只選3條最便宜的邊</text:span><text:span text:style-name="T99"/></text:p>
            <text:p text:style-name="P32" loext:marker-style-name="T99"><text:span text:style-name="T99"><text:s text:c="6"/>/ <text:s text:c="4"/>\ <text:s text:c="25"/>/</text:span><text:span text:style-name="T99"/></text:p>
            <text:p text:style-name="P32" loext:marker-style-name="T99"><text:span text:style-name="T99"><text:s text:c="5"/>B --2-- C <text:s text:c="23"/>B --2-- C</text:span><text:span text:style-name="T99"/></text:p>
            <text:p text:style-name="P32" loext:marker-style-name="T99"><text:span text:style-name="T99"><text:s text:c="6"/>\ <text:s text:c="4"/>/ <text:s text:c="33"/>\</text:span><text:span text:style-name="T99"/></text:p>
            <text:p text:style-name="P32" loext:marker-style-name="T99"><text:span text:style-name="T99"><text:s text:c="7"/>5 <text:s text:c="2"/>3 <text:s text:c="35"/>3</text:span><text:span text:style-name="T99"/></text:p>
            <text:p text:style-name="P32" loext:marker-style-name="T99"><text:span text:style-name="T99"><text:s text:c="8"/>\ / <text:s text:c="37"/>\</text:span><text:span text:style-name="T99"/></text:p>
            <text:p text:style-name="P33" loext:marker-style-name="T99"><text:span text:style-name="T99"><text:s text:c="9"/>D <text:s text:c="39"/>D</text:span><text:span text:style-name="T99"/></text:p>
            <text:p text:style-name="P16" loext:marker-style-name="T99"><text:span text:style-name="T99">邊清單：AB=1, AC=4, BC=2, BD=5, CD=3 <text:s text:c="2"/>✅ MST 邊：AB=1, BC=2, CD=3</text:span><text:span text:style-name="T99"/></text:p>
            <text:p text:style-name="P34" loext:marker-style-name="T99"><text:span text:style-name="T99">總費用 = 1+2+3 = 6（最省！）</text:span><text:span text:style-name="T99"/></text:p>
            <text:p text:style-name="P16" loext:marker-style-name="T44"><text:span text:style-name="T45">❌ </text:span><text:span text:style-name="T46">不選 </text:span><text:span text:style-name="T45">AC=4</text:span><text:span text:style-name="T46">：若選了，</text:span><text:span text:style-name="T45">A─B─C─A </text:span><text:span text:style-name="T46">形成迴路，而且費用還比較貴</text:span></text:p>
            <text:p text:style-name="P16" loext:marker-style-name="T44"><text:span text:style-name="T45">❌ </text:span><text:span text:style-name="T46">不選 </text:span><text:span text:style-name="T45">BD=5</text:span><text:span text:style-name="T46">：若選了，</text:span><text:span text:style-name="T45">B─C─D─B </text:span><text:span text:style-name="T46">形成迴路，同樣多此一舉</text:span></text:p>
            <text:p text:style-name="P27" loext:marker-style-name="T100"><text:span text:style-name="T101">✅ </text:span><text:span text:style-name="T102">驗證：</text:span><text:span text:style-name="T101">4</text:span><text:span text:style-name="T102">個節點 → </text:span><text:span text:style-name="T101">V-1 = 3 </text:span><text:span text:style-name="T102">條邊 <text:s/>✅ <text:s/>無迴路 <text:s/>✅ <text:s text:c="2"/>覆蓋 </text:span><text:span text:style-name="T101">A,B,C,D <text:s/>✅</text:span></text:p>
          </table:table-cell>
        </table:table-row>
      </table:table>
      <text:p text:style-name="P5"/>
      <text:h text:style-name="P9" text:outline-level="2" loext:marker-style-name="T23"><text:span text:style-name="T23">1-4 </text:span><text:span text:style-name="T24">為什麼連通圖才有 </text:span><text:span text:style-name="T23">MST</text:span><text:span text:style-name="T24">？</text:span></text:h>
      <text:p text:style-name="P5"/>
      <text:p text:style-name="P11" loext:marker-style-name="T30"><text:span text:style-name="T31">假設圖有兩個完全分開的部分（</text:span><text:span text:style-name="T32">A-B </text:span><text:span text:style-name="T31">和 </text:span><text:span text:style-name="T32">C-D</text:span><text:span text:style-name="T31">，中間沒有任何邊相連），那麼 </text:span><text:span text:style-name="T32">A </text:span><text:span text:style-name="T31">永遠無法到達 </text:span><text:span text:style-name="T32">C</text:span><text:span text:style-name="T31">，也就不可能用任何方式把它們都連起來，</text:span><text:span text:style-name="T32">MST </text:span><text:span text:style-name="T31">就不存在了。這時候只能各自做「最小擴張森林（</text:span><text:span text:style-name="T32">Minimum Spanning Forest</text:span><text:span text:style-name="T31">）」。</text:span></text:p>
      <text:p text:style-name="P5"/>
      <text:p text:style-name="Standard"/>
      <text:h text:style-name="P8" text:outline-level="1" loext:marker-style-name="T21"><text:span text:style-name="T22">二、三種 </text:span><text:span text:style-name="T21">MST </text:span><text:span text:style-name="T22">演算法快速比較</text:span></text:h>
      <text:p text:style-name="P5"/>
      <text:p text:style-name="P11" loext:marker-style-name="T30"><text:span text:style-name="T31">求 </text:span><text:span text:style-name="T32">MST </text:span><text:span text:style-name="T31">有三種主流演算法，它們的「切入點」不同：</text:span><text:span text:style-name="T103">Prim </text:span><text:span text:style-name="T104">從點出發</text:span><text:span text:style-name="T31">、</text:span><text:span text:style-name="T105">Kruskal </text:span><text:span text:style-name="T106">從邊出發</text:span><text:span text:style-name="T31">、</text:span><text:span text:style-name="T107">Sollin </text:span><text:span text:style-name="T108">全體同時出發</text:span><text:span text:style-name="T31">。</text:span></text:p>
      <text:p text:style-name="P5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" loext:marker-style-name="T109"><text:span text:style-name="T110">比較項目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Prim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Kruskal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Sollin</text:span><text:span text:style-name="T110">（</text:span><text:span text:style-name="T111">Borůvka</text:span><text:span text:style-name="T110">）</text:span></text:p>
          </table:table-cell>
          <table:table-cell table:style-name="表格14.A1" office:value-type="string">
            <text:p text:style-name="P5" loext:marker-style-name="T109"><text:span text:style-name="T111">MST </text:span><text:span text:style-name="T110">共同特性</text:span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出發點</text:span><text:span text:style-name="T112"/></text:p>
          </table:table-cell>
          <table:table-cell table:style-name="表格14.A2" office:value-type="string">
            <text:p text:style-name="P5" loext:marker-style-name="T114"><text:span text:style-name="T115">從「一個節點」開始往外長</text:span><text:span text:style-name="T114"/></text:p>
          </table:table-cell>
          <table:table-cell table:style-name="表格14.A2" office:value-type="string">
            <text:p text:style-name="P5" loext:marker-style-name="T116"><text:span text:style-name="T117">從「最小邊」開始一條條挑</text:span><text:span text:style-name="T116"/></text:p>
          </table:table-cell>
          <table:table-cell table:style-name="表格14.A2" office:value-type="string">
            <text:p text:style-name="P5" loext:marker-style-name="T118"><text:span text:style-name="T119">從「所有節點」同時出發</text:span><text:span text:style-name="T118"/></text:p>
          </table:table-cell>
          <table:table-cell table:style-name="表格14.A2" office:value-type="string">
            <text:p text:style-name="P5" loext:marker-style-name="T112"><text:span text:style-name="T120">V-1 </text:span><text:span text:style-name="T113">條邊，無 </text:span><text:span text:style-name="T120">Cycle</text:span></text:p>
          </table:table-cell>
        </table:table-row>
        <table:table-row table:style-name="表格14.1">
          <table:table-cell table:style-name="表格14.A3" office:value-type="string">
            <text:p text:style-name="P5" loext:marker-style-name="T112"><text:span text:style-name="T113">核心工具</text:span><text:span text:style-name="T112"/></text:p>
          </table:table-cell>
          <table:table-cell table:style-name="表格14.A3" office:value-type="string">
            <text:p text:style-name="P5" loext:marker-style-name="T112"><text:span text:style-name="T120">Min-Heap </text:span><text:span text:style-name="T113">或矩陣</text:span></text:p>
          </table:table-cell>
          <table:table-cell table:style-name="表格14.A3" office:value-type="string">
            <text:p text:style-name="P5" loext:marker-style-name="T112"><text:span text:style-name="T120">Union-Find</text:span><text:span text:style-name="T113">（並查集）</text:span></text:p>
          </table:table-cell>
          <table:table-cell table:style-name="表格14.A3" office:value-type="string">
            <text:p text:style-name="P5" loext:marker-style-name="T112"><text:span text:style-name="T120">Component </text:span><text:span text:style-name="T113">清單</text:span></text:p>
          </table:table-cell>
          <table:table-cell table:style-name="表格14.A3" office:value-type="string">
            <text:p text:style-name="P5" loext:marker-style-name="T112"><text:span text:style-name="T113">連通圖才存在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21"><text:span text:style-name="T122">時間複雜度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V²) </text:span><text:span text:style-name="T122">或 </text:span><text:span text:style-name="T123">O(E log V)</text:span></text:p>
          </table:table-cell>
          <table:table-cell table:style-name="表格14.A2" office:value-type="string">
            <text:p text:style-name="P5" loext:marker-style-name="T121"><text:span text:style-name="T123">O(E log E)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E log V)</text:span><text:span text:style-name="T121"/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3" office:value-type="string">
            <text:p text:style-name="P5" loext:marker-style-name="T124"><text:span text:style-name="T125">最適圖型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稠密圖（邊很多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稀疏圖（邊很少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平行</text:span><text:span text:style-name="T126">/</text:span><text:span text:style-name="T125">分散式計算</text:span></text:p>
          </table:table-cell>
          <table:table-cell table:style-name="表格14.A3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防止 </text:span><text:span text:style-name="T120">Cycle </text:span><text:span text:style-name="T113">方式</text:span></text:p>
          </table:table-cell>
          <table:table-cell table:style-name="表格14.A2" office:value-type="string">
            <text:p text:style-name="P5" loext:marker-style-name="T112"><text:span text:style-name="T113">樹內→樹外規則，天然防止</text:span><text:span text:style-name="T112"/></text:p>
          </table:table-cell>
          <table:table-cell table:style-name="表格14.A2" office:value-type="string">
            <text:p text:style-name="P5" loext:marker-style-name="T112"><text:span text:style-name="T120">Union-Find </text:span><text:span text:style-name="T113">判斷</text:span></text:p>
          </table:table-cell>
          <table:table-cell table:style-name="表格14.A2" office:value-type="string">
            <text:p text:style-name="P5" loext:marker-style-name="T112"><text:span text:style-name="T120">Component </text:span><text:span text:style-name="T113">合併後自動排除</text:span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</table:table>
      <text:p text:style-name="P5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4" loext:marker-style-name="T25"><text:span text:style-name="T26">🧠 </text:span><text:span text:style-name="T27">一句話記憶口訣：</text:span></text:p>
            <text:p text:style-name="P35" loext:marker-style-name="T127"><text:span text:style-name="T128">Prim </text:span><text:span text:style-name="T129">從「點」長出來 <text:s text:c="2"/></text:span><text:span text:style-name="T128">Kruskal </text:span><text:span text:style-name="T129">從「邊」挑起來 <text:s text:c="2"/></text:span><text:span text:style-name="T128">Sollin </text:span><text:span text:style-name="T129">大家同時搶</text:span></text:p>
            <text:p text:style-name="P36" loext:marker-style-name="T18"><text:span text:style-name="T130">圖很密（邊多）→ </text:span><text:span text:style-name="T131">Prim</text:span><text:span text:style-name="T20"> <text:s/>│ <text:s/></text:span><text:span text:style-name="T130">圖很稀（邊少）→ </text:span><text:span text:style-name="T131">Kruskal </text:span><text:span text:style-name="T20"><text:s/>│ <text:s/></text:span><text:span text:style-name="T19">要</text:span><text:span text:style-name="T130">平行化 → </text:span><text:span text:style-name="T131">Sollin</text:span></text:p>
          </table:table-cell>
        </table:table-row>
      </table:table>
      <text:p text:style-name="P5"/>
      <text:h text:style-name="P9" text:outline-level="2" loext:marker-style-name="T23"><text:span text:style-name="T23">2-1 </text:span><text:span text:style-name="T24">什麼是稠密圖？什麼是稀疏圖？</text:span></text:h>
      <text:p text:style-name="P5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7" loext:marker-style-name="T99"><text:span text:style-name="T99">稠密圖（Dense Graph）： <text:s text:c="13"/>稀疏圖（Sparse Graph）：</text:span><text:span text:style-name="T99"/></text:p>
            <text:p text:style-name="P37" loext:marker-style-name="T99"><text:span text:style-name="T99">邊數 E 接近最大值 V(V-1)/2 <text:s text:c="10"/>邊數 E 遠小於 V(V-1)/2</text:span><text:span text:style-name="T99"/></text:p>
            <text:p text:style-name="P37" loext:marker-style-name="T99"><text:span text:style-name="T99">例：5個城市，幾乎每兩個都有路 <text:s text:c="7"/>例：100個城市，只有 110 條路</text:span><text:span text:style-name="T99"/></text:p>
            <text:p text:style-name="P37" loext:marker-style-name="T99"><text:span text:style-name="T99"><text:s text:c="2"/>A─B─C─D─E <text:s text:c="26"/>A <text:s text:c="9"/>B</text:span><text:span text:style-name="T99"/></text:p>
            <text:p text:style-name="P37" loext:marker-style-name="T99"><text:span text:style-name="T99"><text:s text:c="2"/>│╲│╱│╲│╱│ <text:s text:c="25"/>│ <text:s text:c="9"/>│</text:span><text:span text:style-name="T99"/></text:p>
            <text:p text:style-name="P37" loext:marker-style-name="T99"><text:span text:style-name="T99"><text:s text:c="2"/>└─┼─┼─┼─┘ <text:s text:c="2"/>邊非常多 <text:s text:c="13"/>C──D <text:s text:c="7"/>E</text:span><text:span text:style-name="T99"/></text:p>
            <text:p text:style-name="P37" loext:marker-style-name="T99"><text:span text:style-name="T99">100個節點最多 100×99/2 = 4950 條邊 <text:s text:c="2"/>100個節點可能只有 110 條邊</text:span><text:span text:style-name="T99"/></text:p>
            <text:p text:style-name="P37" loext:marker-style-name="T99"><text:span text:style-name="T99">→ 適合 Prim（不用排序） <text:s text:c="14"/>→ 適合 Kruskal（排序便宜）</text:span><text:span text:style-name="T99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三、</text:span><text:span text:style-name="T21">Prim </text:span><text:span text:style-name="T22">演算法 ── 從節點出發，像樹一樣往外長</text:span></text:h>
      <text:p text:style-name="P5"/>
      <text:h text:style-name="P9" text:outline-level="2" loext:marker-style-name="T23"><text:span text:style-name="T23">3-1 </text:span><text:span text:style-name="T24">核心概念（超新手版解釋）</text:span></text:h>
      <text:p text:style-name="P5"/>
      <text:p text:style-name="P11" loext:marker-style-name="T30"><text:span text:style-name="T31">把 </text:span><text:span text:style-name="T32">Prim </text:span><text:span text:style-name="T31">想像成「蓋電纜網路」的工程：</text:span><text:span text:style-name="T79">先把一個城市接上電纜</text:span><text:span text:style-name="T31">（</text:span><text:span text:style-name="T132">T = </text:span><text:span text:style-name="T133">已連通的城市集合</text:span><text:span text:style-name="T31">），然後</text:span><text:span text:style-name="T134">每次往外找</text:span><text:span text:style-name="T37">「接一個新城市費用最低的電纜」</text:span><text:span text:style-name="T31">，一步步延伸，直到所有城市都有電纜為止。</text:span></text:p>
      <text:p text:style-name="P5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6" loext:marker-style-name="T25"><text:span text:style-name="T26">Prim </text:span><text:span text:style-name="T27">執行步驟（只有</text:span><text:span text:style-name="T26">4</text:span><text:span text:style-name="T27">步！）：</text:span></text:p>
            <text:p text:style-name="P7" loext:marker-style-name="T18"><text:span text:style-name="T20">① </text:span><text:span text:style-name="T93">從任意一個節點出發</text:span><text:span text:style-name="T19">，</text:span><text:span text:style-name="T135">加入「已選集合 </text:span><text:span text:style-name="T136">T</text:span><text:span text:style-name="T19">」。</text:span></text:p>
            <text:p text:style-name="P7" loext:marker-style-name="T18"><text:span text:style-name="T20">② </text:span><text:span text:style-name="T130">列出所有「</text:span><text:span text:style-name="T131">T </text:span><text:span text:style-name="T130">內 → </text:span><text:span text:style-name="T131">T </text:span><text:span text:style-name="T130">外」的邊</text:span><text:span text:style-name="T19">，這些叫</text:span><text:span text:style-name="T98">「候選邊」</text:span><text:span text:style-name="T19">。</text:span></text:p>
            <text:p text:style-name="P7" loext:marker-style-name="T18"><text:span text:style-name="T20">③ </text:span><text:span text:style-name="T137">從候選邊中挑出權重最小者</text:span><text:span text:style-name="T19">，</text:span><text:span text:style-name="T93">加入 </text:span><text:span text:style-name="T138">MST</text:span><text:span text:style-name="T19">，並</text:span><text:span text:style-name="T135">把新節點加入 </text:span><text:span text:style-name="T136">T</text:span><text:span text:style-name="T19">。</text:span></text:p>
            <text:p text:style-name="P7" loext:marker-style-name="T18"><text:span text:style-name="T20">④ </text:span><text:span text:style-name="T19">重複步驟②③，</text:span><text:span text:style-name="T98">直到 </text:span><text:span text:style-name="T139">T </text:span><text:span text:style-name="T98">包含全部 </text:span><text:span text:style-name="T139">V </text:span><text:span text:style-name="T98">個節點</text:span><text:span text:style-name="T19">（選了 </text:span><text:span text:style-name="T140">V-1 </text:span><text:span text:style-name="T141">條邊</text:span><text:span text:style-name="T19">）。</text:span></text:p>
            <text:p text:style-name="P38" loext:marker-style-name="T54"><text:span text:style-name="T55">關鍵：候選邊的規則</text:span><text:span text:style-name="T142">「一端在 </text:span><text:span text:style-name="T143">T </text:span><text:span text:style-name="T142">內、另一端在 </text:span><text:span text:style-name="T143">T </text:span><text:span text:style-name="T142">外」天然保證不成環！</text:span></text:p>
          </table:table-cell>
        </table:table-row>
      </table:table>
      <text:p text:style-name="P5"/>
      <text:h text:style-name="P9" text:outline-level="2" loext:marker-style-name="T23"><text:span text:style-name="T23">3-2 </text:span><text:span text:style-name="T24">完整圖解範例（</text:span><text:span text:style-name="T23">4</text:span><text:span text:style-name="T24">個節點 </text:span><text:span text:style-name="T23">A, B, C, D</text:span><text:span text:style-name="T24">）</text:span></text:h>
      <text:p text:style-name="P5"/>
      <text:p text:style-name="P11" loext:marker-style-name="T30"><text:span text:style-name="T31">範例圖：</text:span><text:span text:style-name="T32">AB=1, AC=4, BC=2, BD=5, CD=3</text:span></text:p>
      <text:p text:style-name="P39" loext:marker-style-name="T30"><draw:frame draw:style-name="fr1" draw:name="影像1" text:anchor-type="char" svg:x="4.872cm" svg:y="0.042cm" svg:width="5.943cm" svg:height="5.445cm" draw:z-index="5"><draw:image xlink:href="Pictures/1000000100000224000001F643D3A16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4" loext:marker-style-name="T81"><text:span text:style-name="T83">Step 1</text:span><text:span text:style-name="T82">：從 </text:span><text:span text:style-name="T83">A </text:span><text:span text:style-name="T82">開始，</text:span><text:span text:style-name="T83">T = {A}</text:span></text:p>
            <text:p text:style-name="P16" loext:marker-style-name="T144"><text:span text:style-name="T145">T</text:span><text:span text:style-name="T146">（已連通集合）</text:span><text:span text:style-name="T145">= {A}</text:span></text:p>
            <text:p text:style-name="P16" loext:marker-style-name="T144"><text:span text:style-name="T146">候選邊（</text:span><text:span text:style-name="T145">A </text:span><text:span text:style-name="T146">往外連的邊）：</text:span></text:p>
            <text:p text:style-name="P32" loext:marker-style-name="T147"><text:span text:style-name="T147"><text:s text:c="2"/>A─B = 1 <text:s text:c="2"/>← 最小！選它！</text:span><text:span text:style-name="T147"/></text:p>
            <text:p text:style-name="P34" loext:marker-style-name="T43"><text:span text:style-name="T43"><text:s text:c="2"/>A─C = 4</text:span><text:span text:style-name="T43"/></text:p>
            <text:p text:style-name="P16" loext:marker-style-name="T144"><text:span text:style-name="T146">動作：加入邊 </text:span><text:span text:style-name="T145">A─B=1</text:span><text:span text:style-name="T146">，</text:span><text:span text:style-name="T148">節點 </text:span><text:span text:style-name="T149">B </text:span><text:span text:style-name="T148">加入 </text:span><text:span text:style-name="T149">T</text:span></text:p>
            <text:p text:style-name="P40" loext:marker-style-name="T43"><text:span text:style-name="T43">目前 MST： <text:s/>A │ 1 │ B</text:span><text:span text:style-name="T43"/></text:p>
          </table:table-cell>
        </table:table-row>
      </table:table>
      <text:p text:style-name="P5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4" loext:marker-style-name="T81"><text:span text:style-name="T83">Step 2</text:span><text:span text:style-name="T82">：</text:span><text:span text:style-name="T136">T = {A, B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43"><text:span text:style-name="T43"><text:s text:c="2"/>A─C = 4 <text:s/>（A在T，C在T外）</text:span><text:span text:style-name="T43"/></text:p>
            <text:p text:style-name="P32" loext:marker-style-name="T147"><text:span text:style-name="T147"><text:s text:c="2"/>B─C = 2 <text:s/>（B在T，C在T外）← 最小！</text:span><text:span text:style-name="T147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50"><text:span text:style-name="T150"><text:s text:c="2"/>❌ A─B 兩端都在 T，不是候選邊</text:span><text:span text:style-name="T150"/></text:p>
            <text:p text:style-name="P16" loext:marker-style-name="T144"><text:span text:style-name="T146">動作：加入邊 </text:span><text:span text:style-name="T145">B─C=2</text:span><text:span text:style-name="T146">，</text:span><text:span text:style-name="T148">節點 </text:span><text:span text:style-name="T149">C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</text:span><text:span text:style-name="T43"/></text:p>
          </table:table-cell>
        </table:table-row>
      </table:table>
      <text:p text:style-name="P5"/>
      <table:table table:name="表格20" table:style-name="表格20">
        <table:table-column table:style-name="表格20.A"/>
        <text:soft-page-break/>
        <table:table-row table:style-name="表格20.1">
          <table:table-cell table:style-name="表格20.A1" office:value-type="string">
            <text:p text:style-name="P14" loext:marker-style-name="T81"><text:span text:style-name="T83">Step 3</text:span><text:span text:style-name="T82">：</text:span><text:span text:style-name="T136">T = {A, B, C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, C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150"><text:span text:style-name="T150"><text:s text:c="2"/>A─C = 4 <text:s/>兩端都在T！不是候選邊</text:span><text:span text:style-name="T150"/></text:p>
            <text:p text:style-name="P32" loext:marker-style-name="T150"><text:span text:style-name="T150"><text:s text:c="2"/>B─C = 2 <text:s/>兩端都在T！不是候選邊</text:span><text:span text:style-name="T150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47"><text:span text:style-name="T147"><text:s text:c="2"/>C─D = 3 <text:s/>（C在T，D在T外）← 最小！</text:span><text:span text:style-name="T147"/></text:p>
            <text:p text:style-name="P16" loext:marker-style-name="T144"><text:span text:style-name="T146">動作：加入邊 </text:span><text:span text:style-name="T145">C─D=3</text:span><text:span text:style-name="T146">，</text:span><text:span text:style-name="T148">節點 </text:span><text:span text:style-name="T149">D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 │ 3 │ D</text:span><text:span text:style-name="T43"/></text:p>
          </table:table-cell>
        </table:table-row>
      </table:table>
      <text:p text:style-name="P5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4" loext:marker-style-name="T47"><text:span text:style-name="T48">✅ </text:span><text:span text:style-name="T49">完成！</text:span><text:span text:style-name="T136">T = {A, B, C, D}</text:span><text:span text:style-name="T49">，所有節點已連通</text:span></text:p>
            <text:p text:style-name="P16" loext:marker-style-name="T151"><text:span text:style-name="T152">MST </text:span><text:span text:style-name="T153">邊集合：</text:span><text:span text:style-name="T152">A─B=1, B─C=2, C─D=3</text:span></text:p>
            <text:p text:style-name="P16" loext:marker-style-name="T66"><text:span text:style-name="T67">總權重：</text:span><text:span text:style-name="T68">1 + 2 + 3 = 6</text:span></text:p>
            <text:p text:style-name="P40" loext:marker-style-name="T18"><text:span text:style-name="T19">邊數驗證：</text:span><text:span text:style-name="T20">V-1 = 4-1 = 3 </text:span><text:span text:style-name="T19">條 <text:s/>✅</text:span></text:p>
          </table:table-cell>
        </table:table-row>
      </table:table>
      <text:p text:style-name="P5"/>
      <text:h text:style-name="P9" text:outline-level="2" loext:marker-style-name="T23"><text:span text:style-name="T23">3-3 </text:span><text:span text:style-name="T24">為什麼 </text:span><text:span text:style-name="T23">Prim </text:span><text:span text:style-name="T24">天然不產生 </text:span><text:span text:style-name="T23">Cycle</text:span><text:span text:style-name="T24">？</text:span></text:h>
      <text:p text:style-name="P5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4" loext:marker-style-name="T81"><text:span text:style-name="T82">【規則】：</text:span><text:span text:style-name="T98">候選邊必須「一端在</text:span><text:span text:style-name="T139">T</text:span><text:span text:style-name="T98">、一端不在</text:span><text:span text:style-name="T139">T</text:span><text:span text:style-name="T98">」</text:span></text:p>
            <text:p text:style-name="P41" loext:marker-style-name="T144"><text:span text:style-name="T145">T = {A, B, C}</text:span><text:span text:style-name="T146">：</text:span></text:p>
            <text:p text:style-name="P32" loext:marker-style-name="T99"><text:span text:style-name="T99">✅ 合法候選邊： <text:s text:c="13"/>❌ 自動排除（兩端都在T）：</text:span><text:span text:style-name="T99"/></text:p>
            <text:p text:style-name="P32" loext:marker-style-name="T99"><text:span text:style-name="T99"><text:s text:c="2"/>C → D <text:s/>一端在T外，OK <text:s text:c="7"/>A ─ B <text:s/>兩端都在T，若加 → 成環！</text:span><text:span text:style-name="T99"/></text:p>
            <text:p text:style-name="P34" loext:marker-style-name="T99"><text:span text:style-name="T99"><text:s text:c="2"/>B → D <text:s/>一端在T外，OK <text:s text:c="7"/>B ─ C <text:s/>兩端都在T，若加 → 成環！</text:span><text:span text:style-name="T99"/></text:p>
            <text:p text:style-name="P40" loext:marker-style-name="T100"><text:span text:style-name="T102">結論：</text:span><text:span text:style-name="T154">Prim </text:span><text:span text:style-name="T155">靠「</text:span><text:span text:style-name="T154">T</text:span><text:span text:style-name="T155">內→</text:span><text:span text:style-name="T154">T</text:span><text:span text:style-name="T155">外」規則</text:span><text:span text:style-name="T102">，完全不需要 </text:span><text:span text:style-name="T101">Union-Find</text:span><text:span text:style-name="T102">，也不用額外檢查環，</text:span><text:span text:style-name="T155">天然保證 </text:span><text:span text:style-name="T154">MST </text:span><text:span text:style-name="T155">合法！</text:span></text:p>
          </table:table-cell>
        </table:table-row>
      </table:table>
      <text:p text:style-name="P5"/>
      <text:h text:style-name="P9" text:outline-level="2" loext:marker-style-name="T23"><text:span text:style-name="T23">3-4 Prim </text:span><text:span text:style-name="T24">程式實作（</text:span><text:span text:style-name="T23">C++</text:span><text:span text:style-name="T24">）</text:span></text:h>
      <text:p text:style-name="P5"/>
      <text:p text:style-name="P11" loext:marker-style-name="T30"><text:span text:style-name="T31">以下是 </text:span><text:span text:style-name="T32">Prim </text:span><text:span text:style-name="T31">演算法的 </text:span><text:span text:style-name="T32">C++ </text:span><text:span text:style-name="T31">實作，使用 </text:span><text:span text:style-name="T156">STL </text:span><text:span text:style-name="T53">的</text:span><text:span text:style-name="T31"> </text:span><text:span text:style-name="T157">priority_queue</text:span><text:span text:style-name="T158">（最小堆積）</text:span><text:span text:style-name="T79">讓效率更好</text:span><text:span text:style-name="T31">：</text:span></text:p>
      <text:p text:style-name="P5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6" loext:marker-style-name="T15"><text:span text:style-name="T16">pair&lt;vector&lt;tuple&lt;int,int,int&gt;&gt;, int&gt; </text:span><text:span text:style-name="T17">是什麼？</text:span></text:p>
            <text:p text:style-name="P19" loext:marker-style-name="T18"/>
            <text:p text:style-name="P7" loext:marker-style-name="T18"><text:span text:style-name="T19">這不是圖，而是函式的「回傳型別」，意思是同時回傳兩個東西：</text:span><text:span text:style-name="T18"/></text:p>
            <text:p text:style-name="P19" loext:marker-style-name="T18"/>
            <text:p text:style-name="P28" loext:marker-style-name="T72"><text:span text:style-name="T87">pair&lt;A, B&gt;</text:span><text:span text:style-name="T74"> = </text:span><text:span text:style-name="T159">一個容器</text:span><text:span text:style-name="T73">，裡面裝</text:span><text:span text:style-name="T160">兩個不同型別的值</text:span></text:p>
            <text:p text:style-name="P19" loext:marker-style-name="T18"/>
            <text:p text:style-name="P6" loext:marker-style-name="T161"><text:span text:style-name="T162">第一個：</text:span><text:span text:style-name="T163">vector&lt;tuple&lt;int,int,int&gt;&gt;</text:span></text:p>
            <text:p text:style-name="P7" loext:marker-style-name="T18"><text:span text:style-name="T20">→ MST </text:span><text:span text:style-name="T19">選到的邊清單，</text:span><text:span text:style-name="T135">每條邊</text:span><text:span text:style-name="T98">是一個 </text:span><text:span text:style-name="T139">tuple(</text:span><text:span text:style-name="T98">費用</text:span><text:span text:style-name="T139">, </text:span><text:span text:style-name="T98">起點</text:span><text:span text:style-name="T139">, </text:span><text:span text:style-name="T98">終點</text:span><text:span text:style-name="T139">)</text:span></text:p>
            <text:p text:style-name="P19" loext:marker-style-name="T18"/>
            <text:p text:style-name="P6" loext:marker-style-name="T161"><text:span text:style-name="T162">第二個：</text:span><text:span text:style-name="T163">int</text:span></text:p>
            <text:p text:style-name="P7" loext:marker-style-name="T18"><text:span text:style-name="T20">→ </text:span><text:span text:style-name="T164">MST </text:span><text:span text:style-name="T165">的總費用（一個整數）</text:span></text:p>
            <text:p text:style-name="P19" loext:marker-style-name="T18"/>
            <text:p text:style-name="P26" loext:marker-style-name="T18"><text:span text:style-name="T19">使用時用 </text:span><text:span text:style-name="T138">auto</text:span><text:span text:style-name="T20"> [</text:span><text:span text:style-name="T166">edges, total</text:span><text:span text:style-name="T20">] = </text:span><text:span text:style-name="T167">prim(g, 0)</text:span><text:span text:style-name="T20">; </text:span><text:span text:style-name="T19">一次拆出兩個值</text:span></text:p>
            <text:p text:style-name="P31" loext:marker-style-name="T168"><text:span text:style-name="T139">edges = </text:span><text:span text:style-name="T98">邊清單 </text:span><text:span text:style-name="T139">total = </text:span><text:span text:style-name="T98">總費用</text:span></text:p>
          </table:table-cell>
        </table:table-row>
      </table:table>
      <text:p text:style-name="P19" loext:marker-style-name="T18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6" loext:marker-style-name="T15"><text:span text:style-name="T16">Graph</text:span><text:span text:style-name="T17">（圖）本人長這樣</text:span></text:p>
            <text:p text:style-name="P19" loext:marker-style-name="T18"/>
            <text:p text:style-name="P42" loext:marker-style-name="T169"><text:soft-page-break/><text:span text:style-name="T169">using Graph = vector&lt;vector&lt;pair&lt;int,int&gt;&gt;&gt;;</text:span><text:span text:style-name="T169"/></text:p>
            <text:p text:style-name="P19" loext:marker-style-name="T18"/>
            <text:p text:style-name="P7" loext:marker-style-name="T18"><text:span text:style-name="T19">一層一層拆開來讀：</text:span><text:span text:style-name="T18"/></text:p>
            <text:p text:style-name="P26" loext:marker-style-name="T18"><text:span text:style-name="T20">pair&lt;int,int&gt; = </text:span><text:span text:style-name="T19">一條邊，存 </text:span><text:span text:style-name="T20">{</text:span><text:span text:style-name="T19">費用</text:span><text:span text:style-name="T20">, </text:span><text:span text:style-name="T19">目標節點</text:span><text:span text:style-name="T20">}</text:span></text:p>
            <text:p text:style-name="P26" loext:marker-style-name="T18"><text:span text:style-name="T20">vector&lt;pair&lt;int,int&gt;&gt; = </text:span><text:span text:style-name="T170">某個節點</text:span><text:span text:style-name="T19">的所有出邊（鄰邊清單）</text:span></text:p>
            <text:p text:style-name="P26" loext:marker-style-name="T18"><text:span text:style-name="T20">vector&lt;vector&lt;pair&lt;int,int&gt;&gt;&gt; = </text:span><text:span text:style-name="T19">整張圖，每個節點各有一份鄰邊清單</text:span></text:p>
            <text:p text:style-name="P19" loext:marker-style-name="T18"/>
            <text:p text:style-name="P7" loext:marker-style-name="T18"><text:span text:style-name="T19">以本章範例（</text:span><text:span text:style-name="T20">A=0, B=1, C=2, D=3</text:span><text:span text:style-name="T19">）為例，建好圖後長這樣：</text:span></text:p>
            <text:p text:style-name="P19" loext:marker-style-name="T18"/>
            <text:p text:style-name="P42" loext:marker-style-name="T169"><text:span text:style-name="T169">g[0] = { {1,1}, {4,2} } // A </text:span><text:span text:style-name="T171">連到 </text:span><text:span text:style-name="T169">B(</text:span><text:span text:style-name="T171">費用</text:span><text:span text:style-name="T169">1)</text:span><text:span text:style-name="T171">、</text:span><text:span text:style-name="T169">C(</text:span><text:span text:style-name="T171">費用</text:span><text:span text:style-name="T169">4)</text:span></text:p>
            <text:p text:style-name="P42" loext:marker-style-name="T169"><text:span text:style-name="T169">g[1] = { {1,0}, {2,2}, {5,3} } // B </text:span><text:span text:style-name="T171">連到 </text:span><text:span text:style-name="T169">A(1)</text:span><text:span text:style-name="T171">、</text:span><text:span text:style-name="T169">C(2)</text:span><text:span text:style-name="T171">、</text:span><text:span text:style-name="T169">D(5)</text:span></text:p>
            <text:p text:style-name="P42" loext:marker-style-name="T169"><text:span text:style-name="T169">g[2] = { {4,0}, {2,1}, {3,3} } // C </text:span><text:span text:style-name="T171">連到 </text:span><text:span text:style-name="T169">A(4)</text:span><text:span text:style-name="T171">、</text:span><text:span text:style-name="T169">B(2)</text:span><text:span text:style-name="T171">、</text:span><text:span text:style-name="T169">D(3)</text:span></text:p>
            <text:p text:style-name="P42" loext:marker-style-name="T169"><text:span text:style-name="T169">g[3] = { {5,1}, {3,2} } // D </text:span><text:span text:style-name="T171">連到 </text:span><text:span text:style-name="T169">B(5)</text:span><text:span text:style-name="T171">、</text:span><text:span text:style-name="T169">C(3)</text:span></text:p>
            <text:p text:style-name="P19" loext:marker-style-name="T18"/>
            <text:p text:style-name="P31" loext:marker-style-name="T18"><text:span text:style-name="T20">g[i] </text:span><text:span text:style-name="T19">就是「從節點 </text:span><text:span text:style-name="T20">i </text:span><text:span text:style-name="T19">出發，可以走到哪裡、費用是多少」的清單。</text:span></text:p>
          </table:table-cell>
        </table:table-row>
      </table:table>
      <text:p text:style-name="P19" loext:marker-style-name="T18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2" loext:marker-style-name="T172"><text:span text:style-name="T172">// ── </text:span><text:span text:style-name="T173">需要的標頭檔 ────────────────────────────────────────────</text:span></text:p>
            <text:p text:style-name="P42" loext:marker-style-name="T169"><text:span text:style-name="T169">#include &lt;iostream&gt; // cout</text:span><text:span text:style-name="T171">：在螢幕印出結果</text:span></text:p>
            <text:p text:style-name="P42" loext:marker-style-name="T169"><text:span text:style-name="T169">#include &lt;vector&gt; // vector</text:span><text:span text:style-name="T171">：動態陣列，用來存圖的邊</text:span></text:p>
            <text:p text:style-name="P42" loext:marker-style-name="T169"><text:span text:style-name="T169">#include &lt;queue&gt; // priority_queue</text:span><text:span text:style-name="T171">：</text:span><text:span text:style-name="T169">min-heap</text:span><text:span text:style-name="T171">，用來每次找最小邊</text:span></text:p>
            <text:p text:style-name="P42" loext:marker-style-name="T169"><text:span text:style-name="T169">#include &lt;tuple&gt; // tuple</text:span><text:span text:style-name="T171">：一次存多個值，例如 </text:span><text:span text:style-name="T169">(</text:span><text:span text:style-name="T171">費用</text:span><text:span text:style-name="T169">, </text:span><text:span text:style-name="T171">節點</text:span><text:span text:style-name="T169">A, </text:span><text:span text:style-name="T171">節點</text:span><text:span text:style-name="T169">B)</text:span></text:p>
            <text:p text:style-name="P42" loext:marker-style-name="T169"><text:span text:style-name="T169">#include &lt;climits&gt; // INT_MAX</text:span><text:span text:style-name="T171">：表示「無限大」的整數</text:span></text:p>
            <text:p text:style-name="P42" loext:marker-style-name="T169"><text:span text:style-name="T169">using namespace std; // </text:span><text:span text:style-name="T171">省去每次寫 </text:span><text:span text:style-name="T169">std:: </text:span><text:span text:style-name="T171">的麻煩</text:span></text:p>
            <text:p text:style-name="P43" loext:marker-style-name="T174"/>
            <text:p text:style-name="P42" loext:marker-style-name="T172"><text:span text:style-name="T172">// ── </text:span><text:span text:style-name="T173">定義「圖」的資料型別 ────────────────────────────────────</text:span></text:p>
            <text:p text:style-name="P42" loext:marker-style-name="T175"><text:span text:style-name="T175">// pair&lt;int,int&gt;</text:span><text:span text:style-name="T176">：一條邊，存 </text:span><text:span text:style-name="T175">{</text:span><text:span text:style-name="T176">費用</text:span><text:span text:style-name="T175">, </text:span><text:span text:style-name="T176">目標節點</text:span><text:span text:style-name="T175">}</text:span></text:p>
            <text:p text:style-name="P42" loext:marker-style-name="T175"><text:span text:style-name="T175">// vector&lt;pair&lt;int,int&gt;&gt;</text:span><text:span text:style-name="T176">：某個節點的所有出邊</text:span></text:p>
            <text:p text:style-name="P42" loext:marker-style-name="T175"><text:span text:style-name="T175">// Graph</text:span><text:span text:style-name="T176">：整張圖，</text:span><text:span text:style-name="T175">graph[u] </text:span><text:span text:style-name="T176">存從 </text:span><text:span text:style-name="T175">u </text:span><text:span text:style-name="T176">出發的所有邊</text:span></text:p>
            <text:p text:style-name="P42" loext:marker-style-name="T169"><text:span text:style-name="T169">using Graph = vector&lt;vector&lt;pair&lt;int,int&gt;&gt;&gt;;</text:span><text:span text:style-name="T169"/></text:p>
            <text:p text:style-name="P43" loext:marker-style-name="T174"/>
            <text:p text:style-name="P42" loext:marker-style-name="T172"><text:span text:style-name="T172">// ── Prim </text:span><text:span text:style-name="T173">主函式 ─────────────────────────────────────────────</text:span></text:p>
            <text:p text:style-name="P42" loext:marker-style-name="T175"><text:span text:style-name="T175">// </text:span><text:span text:style-name="T176">輸入：</text:span><text:span text:style-name="T175">graph</text:span><text:span text:style-name="T176">（整張圖）、</text:span><text:span text:style-name="T175">start</text:span><text:span text:style-name="T176">（從哪個節點出發，預設節點</text:span><text:span text:style-name="T175">0</text:span><text:span text:style-name="T176">）</text:span></text:p>
            <text:p text:style-name="P42" loext:marker-style-name="T175"><text:span text:style-name="T175">// </text:span><text:span text:style-name="T176">輸出：</text:span><text:span text:style-name="T175">MST </text:span><text:span text:style-name="T176">的邊清單 </text:span><text:span text:style-name="T175">+ </text:span><text:span text:style-name="T176">總權重</text:span></text:p>
            <text:p text:style-name="P42" loext:marker-style-name="T169"><text:span text:style-name="T169">pair&lt;vector&lt;tuple&lt;int,int,int&gt;&gt;, int&gt;</text:span><text:span text:style-name="T169"/></text:p>
            <text:p text:style-name="P42" loext:marker-style-name="T169"><text:span text:style-name="T169">prim(const Graph&amp; graph, int start = 0) {</text:span><text:span text:style-name="T169"/></text:p>
            <text:p text:style-name="P43" loext:marker-style-name="T174"/>
            <text:p text:style-name="P42" loext:marker-style-name="T169"><text:span text:style-name="T169">int n = graph.size(); // </text:span><text:span text:style-name="T171">節點總數，例如</text:span><text:span text:style-name="T169">4</text:span><text:span text:style-name="T171">個城市 </text:span><text:span text:style-name="T169">n=4</text:span></text:p>
            <text:p text:style-name="P43" loext:marker-style-name="T174"/>
            <text:p text:style-name="P42" loext:marker-style-name="T175"><text:span text:style-name="T175">// inTree[i] = true </text:span><text:span text:style-name="T176">表示節點 </text:span><text:span text:style-name="T175">i </text:span><text:span text:style-name="T176">已加入 </text:span><text:span text:style-name="T175">MST</text:span><text:span text:style-name="T176">（已接上電纜）</text:span></text:p>
            <text:p text:style-name="P42" loext:marker-style-name="T175"><text:span text:style-name="T175">// </text:span><text:span text:style-name="T176">一開始所有城市都還沒接上，全部 </text:span><text:span text:style-name="T175">false</text:span></text:p>
            <text:p text:style-name="P42" loext:marker-style-name="T169"><text:span text:style-name="T169">vector&lt;bool&gt; inTree(n, false);</text:span><text:span text:style-name="T169"/></text:p>
            <text:p text:style-name="P43" loext:marker-style-name="T174"/>
            <text:p text:style-name="P42" loext:marker-style-name="T175"><text:span text:style-name="T175">// mstEdges</text:span><text:span text:style-name="T176">：記錄最終 </text:span><text:span text:style-name="T175">MST </text:span><text:span text:style-name="T176">選了哪些邊</text:span></text:p>
            <text:p text:style-name="P42" loext:marker-style-name="T175"><text:span text:style-name="T175">// </text:span><text:span text:style-name="T176">每條邊存成 </text:span><text:span text:style-name="T175">(</text:span><text:span text:style-name="T176">費用</text:span><text:span text:style-name="T175">, </text:span><text:span text:style-name="T176">起點</text:span><text:span text:style-name="T175">, </text:span><text:span text:style-name="T176">終點</text:span><text:span text:style-name="T175">)</text:span></text:p>
            <text:p text:style-name="P42" loext:marker-style-name="T169"><text:span text:style-name="T169">vector&lt;tuple&lt;int,int,int&gt;&gt; mstEdges;</text:span><text:span text:style-name="T169"/></text:p>
            <text:p text:style-name="P42" loext:marker-style-name="T169"><text:span text:style-name="T169">int total = 0; // MST </text:span><text:span text:style-name="T171">的總費用（一開始是</text:span><text:span text:style-name="T169">0</text:span><text:span text:style-name="T171">）</text:span></text:p>
            <text:p text:style-name="P43" loext:marker-style-name="T174"/>
            <text:p text:style-name="P42" loext:marker-style-name="T172"><text:span text:style-name="T172">// ── Min-Heap</text:span><text:span text:style-name="T173">（最小堆積）────────────────────────────────</text:span></text:p>
            <text:p text:style-name="P42" loext:marker-style-name="T175"><text:span text:style-name="T175">// priority_queue </text:span><text:span text:style-name="T176">預設是「最大堆」（最大值在頂端）</text:span></text:p>
            <text:p text:style-name="P42" loext:marker-style-name="T175"><text:span text:style-name="T175">// </text:span><text:span text:style-name="T176">加上 </text:span><text:span text:style-name="T175">greater&lt;&gt; </text:span><text:span text:style-name="T176">讓它變成「最小堆」（最小值在頂端）</text:span></text:p>
            <text:p text:style-name="P42" loext:marker-style-name="T175"><text:span text:style-name="T175">// </text:span><text:span text:style-name="T176">存的格式：</text:span><text:span text:style-name="T175">(</text:span><text:span text:style-name="T176">費用</text:span><text:span text:style-name="T175">, </text:span><text:span text:style-name="T176">目標節點</text:span><text:span text:style-name="T175">, </text:span><text:span text:style-name="T176">來源節點</text:span><text:span text:style-name="T175">)</text:span></text:p>
            <text:p text:style-name="P42" loext:marker-style-name="T175"><text:span text:style-name="T175">// greater&lt;tuple&lt;...&gt;&gt; </text:span><text:span text:style-name="T176">讓 </text:span><text:span text:style-name="T175">priority_queue </text:span><text:span text:style-name="T176">按費用由小到大排</text:span></text:p>
            <text:p text:style-name="P42" loext:marker-style-name="T169"><text:span text:style-name="T169">priority_queue&lt;</text:span><text:span text:style-name="T169"/></text:p>
            <text:p text:style-name="P42" loext:marker-style-name="T169"><text:span text:style-name="T169">tuple&lt;int,int,int&gt;,</text:span><text:span text:style-name="T169"/></text:p>
            <text:p text:style-name="P42" loext:marker-style-name="T169"><text:span text:style-name="T169">vector&lt;tuple&lt;int,int,int&gt;&gt;,</text:span><text:span text:style-name="T169"/></text:p>
            <text:p text:style-name="P42" loext:marker-style-name="T169"><text:span text:style-name="T169">greater&lt;tuple&lt;int,int,int&gt;&gt; // </text:span><text:span text:style-name="T171">這行讓它變成 </text:span><text:span text:style-name="T169">min-heap</text:span></text:p>
            <text:p text:style-name="P42" loext:marker-style-name="T169"><text:span text:style-name="T169">&gt; pq;</text:span><text:span text:style-name="T169"/></text:p>
            <text:p text:style-name="P43" loext:marker-style-name="T174"/>
            <text:p text:style-name="P42" loext:marker-style-name="T175"><text:soft-page-break/><text:span text:style-name="T175">// </text:span><text:span text:style-name="T176">把起點放進 </text:span><text:span text:style-name="T175">heap</text:span><text:span text:style-name="T176">，費用</text:span><text:span text:style-name="T175">=0</text:span><text:span text:style-name="T176">（虛擬邊，只是為了啟動迴圈）</text:span></text:p>
            <text:p text:style-name="P42" loext:marker-style-name="T175"><text:span text:style-name="T175">// -1 </text:span><text:span text:style-name="T176">表示「沒有來源節點」</text:span></text:p>
            <text:p text:style-name="P42" loext:marker-style-name="T169"><text:span text:style-name="T169">pq.push({0, start, -1});</text:span><text:span text:style-name="T169"/></text:p>
            <text:p text:style-name="P43" loext:marker-style-name="T174"/>
            <text:p text:style-name="P42" loext:marker-style-name="T172"><text:span text:style-name="T172">// ── </text:span><text:span text:style-name="T173">主迴圈：不斷取出最小費用的候選邊 ──────────────────</text:span></text:p>
            <text:p text:style-name="P42" loext:marker-style-name="T175"><text:span text:style-name="T175">// </text:span><text:span text:style-name="T176">條件：</text:span><text:span text:style-name="T175">heap </text:span><text:span text:style-name="T176">不為空 且 </text:span><text:span text:style-name="T175">MST </text:span><text:span text:style-name="T176">邊數還不到 </text:span><text:span text:style-name="T175">n-1</text:span></text:p>
            <text:p text:style-name="P42" loext:marker-style-name="T169"><text:span text:style-name="T169">while (!pq.empty() &amp;&amp; (int)mstEdges.size() &lt; n - 1) {</text:span><text:span text:style-name="T169"/></text:p>
            <text:p text:style-name="P43" loext:marker-style-name="T174"/>
            <text:p text:style-name="P42" loext:marker-style-name="T175"><text:span text:style-name="T175">// </text:span><text:span text:style-name="T176">從 </text:span><text:span text:style-name="T175">heap </text:span><text:span text:style-name="T176">頂端取出費用最小的邊</text:span></text:p>
            <text:p text:style-name="P42" loext:marker-style-name="T175"><text:span text:style-name="T175">// auto [w, u, prev]</text:span><text:span text:style-name="T176">：</text:span><text:span text:style-name="T175">C++17 </text:span><text:span text:style-name="T176">結構化綁定，一次拆開 </text:span><text:span text:style-name="T175">tuple</text:span></text:p>
            <text:p text:style-name="P42" loext:marker-style-name="T175"><text:span text:style-name="T175">// w = </text:span><text:span text:style-name="T176">費用</text:span><text:span text:style-name="T175">, u = </text:span><text:span text:style-name="T176">目標節點</text:span><text:span text:style-name="T175">, prev = </text:span><text:span text:style-name="T176">來源節點</text:span></text:p>
            <text:p text:style-name="P42" loext:marker-style-name="T169"><text:span text:style-name="T169">auto [w, u, prev] = pq.top(); pq.pop();</text:span><text:span text:style-name="T169"/></text:p>
            <text:p text:style-name="P43" loext:marker-style-name="T174"/>
            <text:p text:style-name="P42" loext:marker-style-name="T175"><text:span text:style-name="T175">// </text:span><text:span text:style-name="T176">如果 </text:span><text:span text:style-name="T175">u </text:span><text:span text:style-name="T176">已經在 </text:span><text:span text:style-name="T175">MST </text:span><text:span text:style-name="T176">裡，跳過（避免重複加入）</text:span></text:p>
            <text:p text:style-name="P42" loext:marker-style-name="T169"><text:span text:style-name="T169">if (inTree[u]) continue;</text:span><text:span text:style-name="T169"/></text:p>
            <text:p text:style-name="P43" loext:marker-style-name="T174"/>
            <text:p text:style-name="P42" loext:marker-style-name="T169"><text:span text:style-name="T169">inTree[u] = true; // </text:span><text:span text:style-name="T171">把 </text:span><text:span text:style-name="T169">u </text:span><text:span text:style-name="T171">標記為「已加入 </text:span><text:span text:style-name="T169">MST</text:span><text:span text:style-name="T171">」</text:span></text:p>
            <text:p text:style-name="P43" loext:marker-style-name="T174"/>
            <text:p text:style-name="P42" loext:marker-style-name="T175"><text:span text:style-name="T175">// </text:span><text:span text:style-name="T176">如果不是起點的虛擬邊（</text:span><text:span text:style-name="T175">prev != -1</text:span><text:span text:style-name="T176">），就記錄這條邊</text:span></text:p>
            <text:p text:style-name="P42" loext:marker-style-name="T169"><text:span text:style-name="T169">if (prev != -1) {</text:span><text:span text:style-name="T169"/></text:p>
            <text:p text:style-name="P42" loext:marker-style-name="T169"><text:span text:style-name="T169">mstEdges.push_back({w, prev, u}); // </text:span><text:span text:style-name="T171">加入 </text:span><text:span text:style-name="T169">MST</text:span></text:p>
            <text:p text:style-name="P42" loext:marker-style-name="T169"><text:span text:style-name="T169">total += w; // </text:span><text:span text:style-name="T171">累加費用</text:span></text:p>
            <text:p text:style-name="P42" loext:marker-style-name="T169"><text:span text:style-name="T169">}</text:span><text:span text:style-name="T169"/></text:p>
            <text:p text:style-name="P43" loext:marker-style-name="T174"/>
            <text:p text:style-name="P42" loext:marker-style-name="T175"><text:span text:style-name="T175">// </text:span><text:span text:style-name="T176">把 </text:span><text:span text:style-name="T175">u </text:span><text:span text:style-name="T176">的所有鄰邊加進 </text:span><text:span text:style-name="T175">heap</text:span><text:span text:style-name="T176">（只加另一端還不在 </text:span><text:span text:style-name="T175">MST </text:span><text:span text:style-name="T176">的）</text:span></text:p>
            <text:p text:style-name="P42" loext:marker-style-name="T175"><text:span text:style-name="T175">// auto [ew, v]</text:span><text:span text:style-name="T176">：</text:span><text:span text:style-name="T175">ew=</text:span><text:span text:style-name="T176">邊的費用</text:span><text:span text:style-name="T175">, v=</text:span><text:span text:style-name="T176">鄰居節點</text:span></text:p>
            <text:p text:style-name="P42" loext:marker-style-name="T169"><text:span text:style-name="T169">for (auto [ew, v] : graph[u])</text:span><text:span text:style-name="T169"/></text:p>
            <text:p text:style-name="P42" loext:marker-style-name="T169"><text:span text:style-name="T169">if (!inTree[v])</text:span><text:span text:style-name="T169"/></text:p>
            <text:p text:style-name="P42" loext:marker-style-name="T169"><text:span text:style-name="T169">pq.push({ew, v, u}); // </text:span><text:span text:style-name="T171">候選邊：從</text:span><text:span text:style-name="T169">u</text:span><text:span text:style-name="T171">到</text:span><text:span text:style-name="T169">v</text:span><text:span text:style-name="T171">費用</text:span><text:span text:style-name="T169">ew</text:span></text:p>
            <text:p text:style-name="P42" loext:marker-style-name="T169"><text:span text:style-name="T169">}</text:span><text:span text:style-name="T169"/></text:p>
            <text:p text:style-name="P43" loext:marker-style-name="T174"/>
            <text:p text:style-name="P42" loext:marker-style-name="T169"><text:span text:style-name="T169">return {mstEdges, total};</text:span><text:span text:style-name="T169"/></text:p>
            <text:p text:style-name="P42" loext:marker-style-name="T169"><text:span text:style-name="T169">}</text:span><text:span text:style-name="T169"/></text:p>
            <text:p text:style-name="P43" loext:marker-style-name="T174"/>
            <text:p text:style-name="P42" loext:marker-style-name="T172"><text:span text:style-name="T172">// ── </text:span><text:span text:style-name="T173">測試程式 ─────────────────────────────────────────────────</text:span></text:p>
            <text:p text:style-name="P42" loext:marker-style-name="T175"><text:span text:style-name="T175">// </text:span><text:span text:style-name="T176">建圖：</text:span><text:span text:style-name="T175">A=0, B=1, C=2, D=3</text:span></text:p>
            <text:p text:style-name="P42" loext:marker-style-name="T175"><text:span text:style-name="T175">// </text:span><text:span text:style-name="T176">邊：</text:span><text:span text:style-name="T175">AB=1, AC=4, BC=2, BD=5, CD=3</text:span></text:p>
            <text:p text:style-name="P42" loext:marker-style-name="T175"><text:span text:style-name="T175">// </text:span><text:span text:style-name="T176">預期 </text:span><text:span text:style-name="T175">MST</text:span><text:span text:style-name="T176">：</text:span><text:span text:style-name="T175">AB=1 + BC=2 + CD=3 = 6</text:span></text:p>
            <text:p text:style-name="P42" loext:marker-style-name="T169"><text:span text:style-name="T169">int main() {</text:span><text:span text:style-name="T169"/></text:p>
            <text:p text:style-name="P42" loext:marker-style-name="T169"><text:span text:style-name="T169">int n = 4; // 4</text:span><text:span text:style-name="T171">個節點</text:span></text:p>
            <text:p text:style-name="P42" loext:marker-style-name="T169"><text:span text:style-name="T169">Graph g(n); // g[0]~g[3] </text:span><text:span text:style-name="T171">各自是空的鄰邊清單</text:span></text:p>
            <text:p text:style-name="P43" loext:marker-style-name="T174"/>
            <text:p text:style-name="P42" loext:marker-style-name="T175"><text:span text:style-name="T175">// addEdge</text:span><text:span text:style-name="T176">：加一條雙向邊（無向圖，兩端都要加）</text:span></text:p>
            <text:p text:style-name="P42" loext:marker-style-name="T169"><text:span text:style-name="T169">auto addEdge = [&amp;](int u, int v, int w) {</text:span><text:span text:style-name="T169"/></text:p>
            <text:p text:style-name="P42" loext:marker-style-name="T169"><text:span text:style-name="T169">g[u].push_back({w, v}); // u→v </text:span><text:span text:style-name="T171">費用</text:span><text:span text:style-name="T169">w</text:span></text:p>
            <text:p text:style-name="P42" loext:marker-style-name="T169"><text:span text:style-name="T169">g[v].push_back({w, u}); // v→u </text:span><text:span text:style-name="T171">費用</text:span><text:span text:style-name="T169">w</text:span><text:span text:style-name="T171">（無向）</text:span></text:p>
            <text:p text:style-name="P42" loext:marker-style-name="T169"><text:span text:style-name="T169">};</text:span><text:span text:style-name="T169"/></text:p>
            <text:p text:style-name="P43" loext:marker-style-name="T174"/>
            <text:p text:style-name="P42" loext:marker-style-name="T169"><text:span text:style-name="T169">addEdge(0, 1, 1); // A─B = 1</text:span><text:span text:style-name="T169"/></text:p>
            <text:p text:style-name="P42" loext:marker-style-name="T169"><text:span text:style-name="T169">addEdge(0, 2, 4); // A─C = 4</text:span><text:span text:style-name="T169"/></text:p>
            <text:p text:style-name="P42" loext:marker-style-name="T169"><text:span text:style-name="T169">addEdge(1, 2, 2); // B─C = 2</text:span><text:span text:style-name="T169"/></text:p>
            <text:p text:style-name="P42" loext:marker-style-name="T169"><text:span text:style-name="T169">addEdge(1, 3, 5); // B─D = 5</text:span><text:span text:style-name="T169"/></text:p>
            <text:p text:style-name="P42" loext:marker-style-name="T169"><text:span text:style-name="T169">addEdge(2, 3, 3); // C─D = 3</text:span><text:span text:style-name="T169"/></text:p>
            <text:p text:style-name="P43" loext:marker-style-name="T174"/>
            <text:p text:style-name="P42" loext:marker-style-name="T169"><text:span text:style-name="T169">auto [edges, total] = prim(g, 0); // </text:span><text:span text:style-name="T171">從節點</text:span><text:span text:style-name="T169">0(A)</text:span><text:span text:style-name="T171">出發</text:span></text:p>
            <text:p text:style-name="P43" loext:marker-style-name="T174"/>
            <text:p text:style-name="P42" loext:marker-style-name="T169"><text:span text:style-name="T169">cout &lt;&lt; "MST </text:span><text:span text:style-name="T171">邊：</text:span><text:span text:style-name="T169">\n";</text:span></text:p>
            <text:p text:style-name="P42" loext:marker-style-name="T169"><text:span text:style-name="T169">for (auto [w, u, v] : edges)</text:span><text:span text:style-name="T169"/></text:p>
            <text:p text:style-name="P42" loext:marker-style-name="T169"><text:span text:style-name="T169">cout &lt;&lt; u &lt;&lt; "-" &lt;&lt; v &lt;&lt; " </text:span><text:span text:style-name="T171">費用</text:span><text:span text:style-name="T169">=" &lt;&lt; w &lt;&lt; "\n";</text:span></text:p>
            <text:p text:style-name="P42" loext:marker-style-name="T169"><text:span text:style-name="T169">cout &lt;&lt; "</text:span><text:span text:style-name="T171">總權重：</text:span><text:span text:style-name="T169">" &lt;&lt; total &lt;&lt; "\n"; // </text:span><text:span text:style-name="T171">應該是 </text:span><text:span text:style-name="T169">6</text:span></text:p>
            <text:p text:style-name="P42" loext:marker-style-name="T169"><text:span text:style-name="T169">return 0;</text:span><text:span text:style-name="T169"/></text:p>
            <text:p text:style-name="P42" loext:marker-style-name="T169"><text:soft-page-break/><text:span text:style-name="T169">}</text:span><text:span text:style-name="T169"/></text:p>
          </table:table-cell>
        </table:table-row>
      </table:table>
      <text:p text:style-name="P5"/>
      <text:h text:style-name="P9" text:outline-level="2" loext:marker-style-name="T23"><text:span text:style-name="T23">3-5 Prim </text:span><text:span text:style-name="T24">時間複雜度</text:span></text:h>
      <text:p text:style-name="P5"/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 table:style-name="表格26.1">
          <table:table-cell table:style-name="表格26.A1" office:value-type="string">
            <text:p text:style-name="P5" loext:marker-style-name="T177"><text:span text:style-name="T178">版本</text:span><text:span text:style-name="T177"/></text:p>
          </table:table-cell>
          <table:table-cell table:style-name="表格26.A1" office:value-type="string">
            <text:p text:style-name="P5" loext:marker-style-name="T177"><text:span text:style-name="T178">資料結構</text:span><text:span text:style-name="T177"/></text:p>
          </table:table-cell>
          <table:table-cell table:style-name="表格26.A1" office:value-type="string">
            <text:p text:style-name="P5" loext:marker-style-name="T177"><text:span text:style-name="T178">時間複雜度</text:span><text:span text:style-name="T177"/></text:p>
          </table:table-cell>
          <table:table-cell table:style-name="表格26.A1" office:value-type="string">
            <text:p text:style-name="P5" loext:marker-style-name="T177"><text:span text:style-name="T178">什麼時候用？</text:span><text:span text:style-name="T177"/></text:p>
          </table:table-cell>
        </table:table-row>
        <table:table-row table:style-name="表格26.1">
          <table:table-cell table:style-name="表格26.A2" office:value-type="string">
            <text:p text:style-name="P5" loext:marker-style-name="T144"><text:span text:style-name="T146">基本版</text:span><text:span text:style-name="T144"/></text:p>
          </table:table-cell>
          <table:table-cell table:style-name="表格26.A2" office:value-type="string">
            <text:p text:style-name="P5" loext:marker-style-name="T144"><text:span text:style-name="T146">鄰接矩陣</text:span><text:span text:style-name="T144"/></text:p>
          </table:table-cell>
          <table:table-cell table:style-name="表格26.A2" office:value-type="string">
            <text:p text:style-name="P5" loext:marker-style-name="T179"><text:span text:style-name="T180">O(V²)</text:span><text:span text:style-name="T179"/></text:p>
          </table:table-cell>
          <table:table-cell table:style-name="表格26.A2" office:value-type="string">
            <text:p text:style-name="P5" loext:marker-style-name="T144"><text:span text:style-name="T146">稠密圖（邊數接近 </text:span><text:span text:style-name="T145">V²</text:span><text:span text:style-name="T146">）時，這個反而最省</text:span></text:p>
          </table:table-cell>
        </table:table-row>
        <table:table-row table:style-name="表格26.1">
          <table:table-cell table:style-name="表格26.A3" office:value-type="string">
            <text:p text:style-name="P5" loext:marker-style-name="T144"><text:span text:style-name="T146">最佳化版</text:span><text:span text:style-name="T144"/></text:p>
          </table:table-cell>
          <table:table-cell table:style-name="表格26.A3" office:value-type="string">
            <text:p text:style-name="P5" loext:marker-style-name="T144"><text:span text:style-name="T145">Min-Heap</text:span><text:span text:style-name="T146">（優先佇列）</text:span></text:p>
          </table:table-cell>
          <table:table-cell table:style-name="表格26.A3" office:value-type="string">
            <text:p text:style-name="P5" loext:marker-style-name="T181"><text:span text:style-name="T182">O(E log V)</text:span><text:span text:style-name="T181"/></text:p>
          </table:table-cell>
          <table:table-cell table:style-name="表格26.A3" office:value-type="string">
            <text:p text:style-name="P5" loext:marker-style-name="T144"><text:span text:style-name="T146">一般圖，</text:span><text:span text:style-name="T145">E </text:span><text:span text:style-name="T146">不太大時使用</text:span></text:p>
          </table:table-cell>
        </table:table-row>
      </table:table>
      <text:p text:style-name="P5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6" loext:marker-style-name="T25"><text:span text:style-name="T27">【版本一】鄰接矩陣版 → </text:span><text:span text:style-name="T26">O(V²)</text:span></text:p>
            <text:p text:style-name="P6" loext:marker-style-name="T25"><text:span text:style-name="T27">【版本二】</text:span><text:span text:style-name="T26">Min-Heap </text:span><text:span text:style-name="T27">版 → </text:span><text:span text:style-name="T26">O(E log V)</text:span></text:p>
            <text:p text:style-name="P7" loext:marker-style-name="T18"><text:span text:style-name="T19">稠密圖（</text:span><text:span text:style-name="T20">E ≈ V²</text:span><text:span text:style-name="T19">）用版本一更省；稀疏圖用版本二更快。</text:span></text:p>
          </table:table-cell>
        </table:table-row>
      </table:table>
      <text:p text:style-name="P5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6" loext:marker-style-name="T15"><text:span text:style-name="T17">版本一：鄰接矩陣版 → </text:span><text:span text:style-name="T16">O(V²)</text:span></text:p>
            <text:p text:style-name="P19" loext:marker-style-name="T18"/>
            <text:p text:style-name="P7" loext:marker-style-name="T18"><text:span text:style-name="T20">Prim </text:span><text:span text:style-name="T19">的外層迴圈跑 </text:span><text:span text:style-name="T20">V </text:span><text:span text:style-name="T19">次（把 </text:span><text:span text:style-name="T20">V </text:span><text:span text:style-name="T19">個節點一一加入集合 </text:span><text:span text:style-name="T20">T</text:span><text:span text:style-name="T19">）。</text:span></text:p>
            <text:p text:style-name="P7" loext:marker-style-name="T18"><text:span text:style-name="T19">每一次迭代做兩件事：</text:span><text:span text:style-name="T18"/></text:p>
            <text:p text:style-name="P7" loext:marker-style-name="T18"><text:span text:style-name="T20">① </text:span><text:span text:style-name="T183">從所有</text:span><text:span text:style-name="T96">「</text:span><text:span text:style-name="T97">T </text:span><text:span text:style-name="T96">外節點」找距離 </text:span><text:span text:style-name="T97">T </text:span><text:span text:style-name="T96">最近的節點 </text:span><text:span text:style-name="T19">→ 掃描整行矩陣 </text:span><text:span text:style-name="T139">O(V)</text:span></text:p>
            <text:p text:style-name="P7" loext:marker-style-name="T18"><text:span text:style-name="T20">② </text:span><text:span text:style-name="T184">把新節點加入 </text:span><text:span text:style-name="T185">T</text:span><text:span text:style-name="T19">，</text:span><text:span text:style-name="T186">更新其他節點</text:span><text:span text:style-name="T187">到 </text:span><text:span text:style-name="T188">T </text:span><text:span text:style-name="T186">的最短距離</text:span><text:span text:style-name="T19"> → 再掃一整行 </text:span><text:span text:style-name="T139">O(V)</text:span></text:p>
            <text:p text:style-name="P19" loext:marker-style-name="T18"/>
            <text:p text:style-name="P15" loext:marker-style-name="T47"><text:span text:style-name="T48">→ </text:span><text:span text:style-name="T189">外層 </text:span><text:span text:style-name="T190">V </text:span><text:span text:style-name="T189">次 </text:span><text:span text:style-name="T190">× </text:span><text:span text:style-name="T189">每次 </text:span><text:span text:style-name="T190">O(V)</text:span><text:span text:style-name="T48"> = </text:span><text:span text:style-name="T191">O(V × V)</text:span><text:span text:style-name="T48"> = O(V²)</text:span></text:p>
            <text:p text:style-name="P19" loext:marker-style-name="T18"/>
            <text:p text:style-name="P14" loext:marker-style-name="T54"><text:span text:style-name="T55">為什麼每次掃描是 </text:span><text:span text:style-name="T56">O(V)</text:span><text:span text:style-name="T55">？</text:span></text:p>
            <text:p text:style-name="P7" loext:marker-style-name="T18"><text:span text:style-name="T19">鄰接矩陣是 </text:span><text:span text:style-name="T20">V×V </text:span><text:span text:style-name="T19">的表格。</text:span><text:span text:style-name="T98">要找「最近節點」或「更新距離」，</text:span></text:p>
            <text:p text:style-name="P7" loext:marker-style-name="T18"><text:span text:style-name="T98">都必須逐格讀整行</text:span><text:span text:style-name="T19">，共 </text:span><text:span text:style-name="T20">V </text:span><text:span text:style-name="T19">格 → 每次 </text:span><text:span text:style-name="T20">O(V)</text:span><text:span text:style-name="T19">。</text:span></text:p>
            <text:p text:style-name="P19" loext:marker-style-name="T18"/>
            <text:p text:style-name="P14" loext:marker-style-name="T54"><text:span text:style-name="T55">什麼時候 </text:span><text:span text:style-name="T192">O(V²) </text:span><text:span text:style-name="T193">反而比較好？</text:span><text:span text:style-name="T194">稠密圖（</text:span><text:span text:style-name="T195">E ≈ V²</text:span><text:span text:style-name="T194">）</text:span><text:span text:style-name="T93">時；</text:span></text:p>
            <text:p text:style-name="P7" loext:marker-style-name="T18"><text:span text:style-name="T20">O(E log V) ≈ O(V² log V)</text:span><text:span text:style-name="T19">，</text:span><text:span text:style-name="T55">比 </text:span><text:span text:style-name="T56">O(V²) </text:span><text:span text:style-name="T55">還慢！→ </text:span><text:span text:style-name="T193">稠密圖請用矩陣版</text:span><text:span text:style-name="T55">。</text:span></text:p>
          </table:table-cell>
        </table:table-row>
      </table:table>
      <text:p text:style-name="P5"/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office:value-type="string">
            <text:p text:style-name="P5" loext:marker-style-name="T177"><text:span text:style-name="T178">操作</text:span><text:span text:style-name="T177"/></text:p>
          </table:table-cell>
          <table:table-cell table:style-name="表格29.A1" office:value-type="string">
            <text:p text:style-name="P5" loext:marker-style-name="T177"><text:span text:style-name="T178">執行次數</text:span><text:span text:style-name="T177"/></text:p>
          </table:table-cell>
          <table:table-cell table:style-name="表格29.A1" office:value-type="string">
            <text:p text:style-name="P5" loext:marker-style-name="T177"><text:span text:style-name="T178">每次花費</text:span><text:span text:style-name="T177"/></text:p>
          </table:table-cell>
          <table:table-cell table:style-name="表格29.A1" office:value-type="string">
            <text:p text:style-name="P5" loext:marker-style-name="T177"><text:span text:style-name="T178">小計</text:span><text:span text:style-name="T177"/></text:p>
          </table:table-cell>
        </table:table-row>
        <table:table-row table:style-name="表格29.1">
          <table:table-cell table:style-name="表格29.A2" office:value-type="string">
            <text:p text:style-name="P7" loext:marker-style-name="T18"><text:span text:style-name="T19">找最小距離節點</text:span><text:span text:style-name="T18"/></text:p>
          </table:table-cell>
          <table:table-cell table:style-name="表格29.A2" office:value-type="string">
            <text:p text:style-name="P7" loext:marker-style-name="T18"><text:span text:style-name="T20">V </text:span><text:span text:style-name="T19">次（</text:span><text:span text:style-name="T196">每個節點加入一次</text:span><text:span text:style-name="T19">）</text:span></text:p>
          </table:table-cell>
          <table:table-cell table:style-name="表格29.A2" office:value-type="string">
            <text:p text:style-name="P7" loext:marker-style-name="T18"><text:span text:style-name="T20">O(V)</text:span><text:span text:style-name="T19">（</text:span><text:span text:style-name="T197">掃全部 </text:span><text:span text:style-name="T198">T </text:span><text:span text:style-name="T197">外節點</text:span><text:span text:style-name="T19">）</text:span></text:p>
          </table:table-cell>
          <table:table-cell table:style-name="表格29.A2" office:value-type="string">
            <text:p text:style-name="P7" loext:marker-style-name="T18"><text:span text:style-name="T20">V × V = O(V²)</text:span><text:span text:style-name="T18"/></text:p>
          </table:table-cell>
        </table:table-row>
        <table:table-row table:style-name="表格29.1">
          <table:table-cell table:style-name="表格29.A3" office:value-type="string">
            <text:p text:style-name="P7" loext:marker-style-name="T18"><text:span text:style-name="T19">更新鄰居距離</text:span><text:span text:style-name="T18"/></text:p>
          </table:table-cell>
          <table:table-cell table:style-name="表格29.A3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29.A3" office:value-type="string">
            <text:p text:style-name="P7" loext:marker-style-name="T18"><text:span text:style-name="T20">O(V)</text:span><text:span text:style-name="T19">（</text:span><text:span text:style-name="T199">掃整行矩陣</text:span><text:span text:style-name="T19">）</text:span></text:p>
          </table:table-cell>
          <table:table-cell table:style-name="表格29.A3" office:value-type="string">
            <text:p text:style-name="P7" loext:marker-style-name="T18"><text:span text:style-name="T20">V × V = O(V²)</text:span><text:span text:style-name="T18"/></text:p>
          </table:table-cell>
        </table:table-row>
        <table:table-row table:style-name="表格29.1">
          <table:table-cell table:style-name="表格29.A4" office:value-type="string">
            <text:p text:style-name="P14" loext:marker-style-name="T69"><text:span text:style-name="T71">總計</text:span><text:span text:style-name="T69"/></text:p>
          </table:table-cell>
          <table:table-cell table:style-name="表格29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9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9.A4" office:value-type="string">
            <text:p text:style-name="P14" loext:marker-style-name="T69"><text:span text:style-name="T70">O(V²)</text:span><text:span text:style-name="T69"/></text:p>
          </table:table-cell>
        </table:table-row>
      </table:table>
      <text:p text:style-name="P5"/>
      <text:p text:style-name="P7" loext:marker-style-name="T18"><text:soft-page-break/><draw:frame draw:style-name="fr2" draw:name="影像2" text:anchor-type="as-char" svg:width="16cm" svg:height="12.471cm" draw:z-index="0"><draw:image xlink:href="Pictures/1000000000000550000003C07CAFE178.png" xlink:type="simple" xlink:show="embed" xlink:actuate="onLoad" draw:mime-type="image/png"/></draw:frame></text:p>
      <text:p text:style-name="P19" loext:marker-style-name="T18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6" loext:marker-style-name="T15"><text:span text:style-name="T17">版本二：</text:span><text:span text:style-name="T200">Min-Heap</text:span><text:span text:style-name="T201">（最小堆積）版 → </text:span><text:span text:style-name="T202">O(E log V)</text:span></text:p>
            <text:p text:style-name="P19" loext:marker-style-name="T18"/>
            <text:p text:style-name="P6" loext:marker-style-name="T81"><text:span text:style-name="T82">先搞懂 </text:span><text:span text:style-name="T83">Heap </text:span><text:span text:style-name="T82">在幹嘛</text:span></text:p>
            <text:p text:style-name="P19" loext:marker-style-name="T18"/>
            <text:p text:style-name="P7" loext:marker-style-name="T18"><text:span text:style-name="T19">想像你有一堆候選邊，每次都要找「最便宜的那條」。</text:span><text:span text:style-name="T18"/></text:p>
            <text:p text:style-name="P7" loext:marker-style-name="T18"><text:span text:style-name="T19">如果用普通 </text:span><text:span text:style-name="T20">list</text:span><text:span text:style-name="T19">：每次都要從頭掃到尾 → 很慢。</text:span></text:p>
            <text:p text:style-name="P7" loext:marker-style-name="T203"><text:span text:style-name="T204">改用 </text:span><text:span text:style-name="T205">Min-Heap</text:span><text:span text:style-name="T204">：</text:span></text:p>
            <text:p text:style-name="P7" loext:marker-style-name="T18"><text:span text:style-name="T204">最小值永遠自動浮到頂端，直接拿走就好</text:span><text:span text:style-name="T19">。</text:span></text:p>
            <text:p text:style-name="P7" loext:marker-style-name="T18"><text:span text:style-name="T206">放進去一個元素、或拿出頂端元素，只需要 </text:span><text:span text:style-name="T207">log N </text:span><text:span text:style-name="T206">的時間</text:span><text:span text:style-name="T19">。</text:span></text:p>
            <text:p text:style-name="P31" loext:marker-style-name="T18"><text:span text:style-name="T19">（</text:span><text:span text:style-name="T208">N = Heap </text:span><text:span text:style-name="T196">裡目前有幾個元素</text:span><text:span text:style-name="T19">）</text:span></text:p>
            <text:p text:style-name="P19" loext:marker-style-name="T18"/>
            <text:p text:style-name="P6" loext:marker-style-name="T81"><text:span text:style-name="T83">Lazy Prim </text:span><text:span text:style-name="T82">怎麼用這個 </text:span><text:span text:style-name="T83">Heap</text:span><text:span text:style-name="T82">？</text:span></text:p>
            <text:p text:style-name="P19" loext:marker-style-name="T18"/>
            <text:p text:style-name="P7" loext:marker-style-name="T18"><text:span text:style-name="T93">每當有新節點加入 </text:span><text:span text:style-name="T138">T</text:span><text:span text:style-name="T19">，</text:span><text:span text:style-name="T209">就把它</text:span><text:span text:style-name="T210">所有鄰邊</text:span><text:span text:style-name="T209">都 </text:span><text:span text:style-name="T211">push </text:span><text:span text:style-name="T209">進 </text:span><text:span text:style-name="T211">Heap</text:span><text:span text:style-name="T19">（</text:span><text:span text:style-name="T98">不論對方是否已在 </text:span><text:span text:style-name="T139">T </text:span><text:span text:style-name="T98">內</text:span><text:span text:style-name="T19">）。</text:span></text:p>
            <text:p text:style-name="P7" loext:marker-style-name="T18"><text:span text:style-name="T19">因此</text:span><text:span text:style-name="T212">同一個節點可能被多條邊重複放入 </text:span><text:span text:style-name="T213">Heap</text:span><text:span text:style-name="T19">，</text:span><text:span text:style-name="T20">Heap </text:span><text:span text:style-name="T19">中最多累積 </text:span><text:span text:style-name="T20">O(E) </text:span><text:span text:style-name="T19">個元素。</text:span></text:p>
            <text:p text:style-name="P31" loext:marker-style-name="T18"><text:span text:style-name="T98">這就是「</text:span><text:span text:style-name="T139">Lazy</text:span><text:span text:style-name="T98">（懶惰）」</text:span><text:span text:style-name="T19">：</text:span><text:span text:style-name="T214">不先整理，先全丟進去</text:span><text:span text:style-name="T19">，</text:span><text:span text:style-name="T215">拿出來時再判斷有沒有用</text:span><text:span text:style-name="T19">。</text:span></text:p>
            <text:p text:style-name="P19" loext:marker-style-name="T18"/>
            <text:p text:style-name="P6" loext:marker-style-name="T81"><text:span text:style-name="T82">為什麼</text:span><text:span text:style-name="T96">總花費是 </text:span><text:span text:style-name="T97">O(E log V)</text:span><text:span text:style-name="T82">？── 一步一步算</text:span></text:p>
            <text:p text:style-name="P19" loext:marker-style-name="T18"/>
            <text:p text:style-name="P28" loext:marker-style-name="T72"><text:span text:style-name="T73">問：</text:span><text:span text:style-name="T74">Heap </text:span><text:span text:style-name="T73">總共被 </text:span><text:span text:style-name="T74">push </text:span><text:span text:style-name="T73">幾次？</text:span></text:p>
            <text:p text:style-name="P7" loext:marker-style-name="T18"><text:span text:style-name="T19">答：</text:span><text:span text:style-name="T93">每條邊最多被放入一次，共 </text:span><text:span text:style-name="T138">E </text:span><text:span text:style-name="T93">條邊</text:span><text:span text:style-name="T19"> → 總 </text:span><text:span text:style-name="T20">push </text:span><text:span text:style-name="T19">次數 </text:span><text:span text:style-name="T20">= E </text:span><text:span text:style-name="T19">次。</text:span></text:p>
            <text:p text:style-name="P19" loext:marker-style-name="T18"/>
            <text:p text:style-name="P28" loext:marker-style-name="T72"><text:span text:style-name="T73">問：</text:span><text:span text:style-name="T74">Heap </text:span><text:span text:style-name="T73">總共被 </text:span><text:span text:style-name="T74">pop </text:span><text:span text:style-name="T73">幾次？</text:span></text:p>
            <text:p text:style-name="P7" loext:marker-style-name="T18"><text:span text:style-name="T19">答：</text:span><text:span text:style-name="T215">放進去的東西最終都會被拿出來 → 總 </text:span><text:span text:style-name="T216">pop </text:span><text:span text:style-name="T215">次數 </text:span><text:span text:style-name="T216">= E </text:span><text:span text:style-name="T215">次</text:span><text:span text:style-name="T19">。</text:span></text:p>
            <text:p text:style-name="P19" loext:marker-style-name="T18"><text:soft-page-break/></text:p>
            <text:p text:style-name="P28" loext:marker-style-name="T72"><text:span text:style-name="T73">問：一次 </text:span><text:span text:style-name="T74">push </text:span><text:span text:style-name="T73">或 </text:span><text:span text:style-name="T74">pop </text:span><text:span text:style-name="T73">要花多久？</text:span></text:p>
            <text:p text:style-name="P7" loext:marker-style-name="T18"><text:span text:style-name="T19">答：</text:span><text:span text:style-name="T20">Heap </text:span><text:span text:style-name="T19">是一棵樹，</text:span><text:span text:style-name="T20">Heap </text:span><text:span text:style-name="T19">裡有幾個元素，樹就有幾個節點。</text:span></text:p>
            <text:p text:style-name="P7" loext:marker-style-name="T18"><text:span text:style-name="T98">放入或拿走一個元素，最多只需要從根走到葉子（或反過來），也就是走「樹高」次</text:span><text:span text:style-name="T19">。</text:span></text:p>
            <text:p text:style-name="P7" loext:marker-style-name="T18"><text:span text:style-name="T186">樹高 </text:span><text:span text:style-name="T166">= log</text:span><text:span text:style-name="T186">（節點數）</text:span><text:span text:style-name="T166">= log E</text:span><text:span text:style-name="T19">。</text:span></text:p>
            <text:p text:style-name="P7" loext:marker-style-name="T18"><text:span text:style-name="T20">(</text:span><text:span text:style-name="T19">註：</text:span><text:span text:style-name="T217">因為 </text:span><text:span text:style-name="T218">Lazy Prim </text:span><text:span text:style-name="T217">的做法是：每條邊最多被 </text:span><text:span text:style-name="T218">push </text:span><text:span text:style-name="T217">進 </text:span><text:span text:style-name="T218">Heap </text:span><text:span text:style-name="T217">一次，圖裡總共有 </text:span><text:span text:style-name="T218">E </text:span><text:span text:style-name="T217">條邊</text:span><text:span text:style-name="T19">，所以 </text:span><text:span text:style-name="T20">Heap </text:span><text:span text:style-name="T19">裡最多同時存在 </text:span><text:span text:style-name="T20">E </text:span><text:span text:style-name="T19">個元素；也就是說：</text:span><text:span text:style-name="T98">節點數（</text:span><text:span text:style-name="T139">Heap </text:span><text:span text:style-name="T98">的大小）</text:span><text:span text:style-name="T139">= </text:span><text:span text:style-name="T98">最多 </text:span><text:span text:style-name="T139">E </text:span><text:span text:style-name="T98">個</text:span><text:span text:style-name="T20">)</text:span></text:p>
            <text:p text:style-name="P7" loext:marker-style-name="T18"><text:span text:style-name="T19">所以：一次 </text:span><text:span text:style-name="T20">push </text:span><text:span text:style-name="T19">或 </text:span><text:span text:style-name="T20">pop = O(log E)</text:span><text:span text:style-name="T19">。</text:span></text:p>
            <text:p text:style-name="P19" loext:marker-style-name="T18"/>
            <text:p text:style-name="P28" loext:marker-style-name="T72"><text:span text:style-name="T73">問：</text:span><text:span text:style-name="T219">log E </text:span><text:span text:style-name="T159">為什麼可以換成 </text:span><text:span text:style-name="T219">log V</text:span><text:span text:style-name="T159">？</text:span></text:p>
            <text:p text:style-name="P7" loext:marker-style-name="T18"><text:span text:style-name="T19">答：</text:span><text:span text:style-name="T141">圖裡邊數 </text:span><text:span text:style-name="T140">E </text:span><text:span text:style-name="T141">最多是 </text:span><text:span text:style-name="T140">V² </text:span><text:span text:style-name="T141">左右（每兩個節點之間各一條邊）</text:span><text:span text:style-name="T19">。</text:span></text:p>
            <text:p text:style-name="P7" loext:marker-style-name="T18"><text:span text:style-name="T19">所以 </text:span><text:span text:style-name="T166">log E ≤ log V² = 2 × log V</text:span><text:span text:style-name="T19">。</text:span></text:p>
            <text:p text:style-name="P7" loext:marker-style-name="T18"><text:span text:style-name="T20">2 × log V </text:span><text:span text:style-name="T19">在大 </text:span><text:span text:style-name="T20">O </text:span><text:span text:style-name="T19">符號裡，常數 </text:span><text:span text:style-name="T20">2 </text:span><text:span text:style-name="T19">可以去掉，就是 </text:span><text:span text:style-name="T20">O(log V)</text:span><text:span text:style-name="T19">。</text:span></text:p>
            <text:p text:style-name="P31" loext:marker-style-name="T18"><text:span text:style-name="T220">∴ O(log E) = O(log V)</text:span><text:span text:style-name="T19">，兩種寫法是同一個等級，考試都對。</text:span></text:p>
            <text:p text:style-name="P19" loext:marker-style-name="T18"/>
            <text:p text:style-name="P28" loext:marker-style-name="T72"><text:span text:style-name="T73">問：加起來總共多少？</text:span><text:span text:style-name="T72"/></text:p>
            <text:p text:style-name="P7" loext:marker-style-name="T18"><text:span text:style-name="T19">答：</text:span><text:span text:style-name="T18"/></text:p>
            <text:p text:style-name="P26" loext:marker-style-name="T18"><text:span text:style-name="T139">push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39">pop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9">兩個加起來：</text:span><text:span text:style-name="T20">O(E log V) + O(E log V) = O(2E log V)</text:span></text:p>
            <text:p text:style-name="P26" loext:marker-style-name="T18"><text:span text:style-name="T19">大 </text:span><text:span text:style-name="T20">O </text:span><text:span text:style-name="T19">忽略常數倍，</text:span><text:span text:style-name="T20">O(2E log V) = O(E log V)</text:span><text:span text:style-name="T19">。</text:span></text:p>
            <text:p text:style-name="P19" loext:marker-style-name="T18"/>
            <text:p text:style-name="P31" loext:marker-style-name="T18"><text:span text:style-name="T19">就像</text:span><text:span text:style-name="T215">「走 </text:span><text:span text:style-name="T216">2 </text:span><text:span text:style-name="T215">公里」和「走 </text:span><text:span text:style-name="T216">1 </text:span><text:span text:style-name="T215">公里」在量級上是同一個等級</text:span><text:span text:style-name="T19">，</text:span></text:p>
            <text:p text:style-name="P31" loext:marker-style-name="T18"><text:span text:style-name="T20">Big-O </text:span><text:span text:style-name="T19">只看「大概多少量級」，不管前面的常數係數。</text:span></text:p>
          </table:table-cell>
        </table:table-row>
      </table:table>
      <text:p text:style-name="P5"/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D"/>
        <table:table-row table:style-name="表格31.1">
          <table:table-cell table:style-name="表格31.A1" office:value-type="string">
            <text:p text:style-name="P5" loext:marker-style-name="T177"><text:span text:style-name="T178">操作</text:span><text:span text:style-name="T177"/></text:p>
          </table:table-cell>
          <table:table-cell table:style-name="表格31.A1" office:value-type="string">
            <text:p text:style-name="P5" loext:marker-style-name="T177"><text:span text:style-name="T178">發生幾次</text:span><text:span text:style-name="T177"/></text:p>
          </table:table-cell>
          <table:table-cell table:style-name="表格31.A1" office:value-type="string">
            <text:p text:style-name="P5" loext:marker-style-name="T177"><text:span text:style-name="T178">每次花多久</text:span><text:span text:style-name="T177"/></text:p>
          </table:table-cell>
          <table:table-cell table:style-name="表格31.A1" office:value-type="string">
            <text:p text:style-name="P5" loext:marker-style-name="T177"><text:span text:style-name="T178">小計</text:span><text:span text:style-name="T177"/></text:p>
          </table:table-cell>
        </table:table-row>
        <table:table-row table:style-name="表格31.1">
          <table:table-cell table:style-name="表格31.A2" office:value-type="string">
            <text:p text:style-name="P7" loext:marker-style-name="T18"><text:span text:style-name="T20">push </text:span><text:span text:style-name="T19">進 </text:span><text:span text:style-name="T20">Heap</text:span></text:p>
          </table:table-cell>
          <table:table-cell table:style-name="表格31.A2" office:value-type="string">
            <text:p text:style-name="P7" loext:marker-style-name="T221"><text:span text:style-name="T222">E </text:span><text:span text:style-name="T223">次（每條邊一次）</text:span></text:p>
          </table:table-cell>
          <table:table-cell table:style-name="表格31.A2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1.A2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1.1">
          <table:table-cell table:style-name="表格31.A3" office:value-type="string">
            <text:p text:style-name="P7" loext:marker-style-name="T18"><text:span text:style-name="T20">pop </text:span><text:span text:style-name="T19">出 </text:span><text:span text:style-name="T20">Heap</text:span></text:p>
          </table:table-cell>
          <table:table-cell table:style-name="表格31.A3" office:value-type="string">
            <text:p text:style-name="P7" loext:marker-style-name="T224"><text:span text:style-name="T225">E </text:span><text:span text:style-name="T226">次（放幾次拿幾次）</text:span></text:p>
          </table:table-cell>
          <table:table-cell table:style-name="表格31.A3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1.A3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1.1">
          <table:table-cell table:style-name="表格31.A2" office:value-type="string">
            <text:p text:style-name="P7" loext:marker-style-name="T18"><text:span text:style-name="T19">節點加入 </text:span><text:span text:style-name="T20">T</text:span></text:p>
          </table:table-cell>
          <table:table-cell table:style-name="表格31.A2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31.A2" office:value-type="string">
            <text:p text:style-name="P7" loext:marker-style-name="T18"><text:span text:style-name="T20">O(1)</text:span><text:span text:style-name="T19">（直接標記）</text:span></text:p>
          </table:table-cell>
          <table:table-cell table:style-name="表格31.A2" office:value-type="string">
            <text:p text:style-name="P7" loext:marker-style-name="T18"><text:span text:style-name="T20">O(V)</text:span><text:span text:style-name="T19">，可忽略</text:span></text:p>
          </table:table-cell>
        </table:table-row>
        <table:table-row table:style-name="表格31.1">
          <table:table-cell table:style-name="表格31.A3" office:value-type="string">
            <text:p text:style-name="P5" loext:marker-style-name="T50"><text:span text:style-name="T52">總計</text:span><text:span text:style-name="T50"/></text:p>
          </table:table-cell>
          <table:table-cell table:style-name="表格31.A3" office:value-type="string">
            <text:p text:style-name="P5" loext:marker-style-name="T50"><text:span text:style-name="T51">—</text:span><text:span text:style-name="T50"/></text:p>
          </table:table-cell>
          <table:table-cell table:style-name="表格31.A3" office:value-type="string">
            <text:p text:style-name="P5" loext:marker-style-name="T50"><text:span text:style-name="T51">—</text:span><text:span text:style-name="T50"/></text:p>
          </table:table-cell>
          <table:table-cell table:style-name="表格31.A3" office:value-type="string">
            <text:p text:style-name="P5" loext:marker-style-name="T227"><text:span text:style-name="T228">O(E log V) + O(E log V) = O(E log V)</text:span><text:span text:style-name="T227"/></text:p>
          </table:table-cell>
        </table:table-row>
      </table:table>
      <text:p text:style-name="P5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" loext:marker-style-name="T50"><text:span text:style-name="T51">✅ </text:span><text:span text:style-name="T52">考試最簡單記法</text:span></text:p>
            <text:p text:style-name="P19" loext:marker-style-name="T18"/>
            <text:p text:style-name="P7" loext:marker-style-name="T18"><text:span text:style-name="T98">每條邊進出 </text:span><text:span text:style-name="T139">Heap </text:span><text:span text:style-name="T98">各一次</text:span><text:span text:style-name="T19"> </text:span><text:span text:style-name="T20">= </text:span><text:span text:style-name="T97">O(E) </text:span><text:span text:style-name="T96">次操作</text:span></text:p>
            <text:p text:style-name="P7" loext:marker-style-name="T18"><text:span text:style-name="T166">Heap </text:span><text:span text:style-name="T186">大小最多 </text:span><text:span text:style-name="T166">E </text:span><text:span text:style-name="T20">→ </text:span><text:span text:style-name="T19">每次操作 </text:span><text:span text:style-name="T229">O(log E) = O(log V)</text:span></text:p>
            <text:p text:style-name="P28" loext:marker-style-name="T72"><text:span text:style-name="T74">→ </text:span><text:span text:style-name="T73">總計 </text:span><text:span text:style-name="T74">O(E log V)</text:span></text:p>
            <text:p text:style-name="P19" loext:marker-style-name="T18"/>
            <text:p text:style-name="P31" loext:marker-style-name="T18"><text:span text:style-name="T20">O(E log V) </text:span><text:span text:style-name="T19">和 </text:span><text:span text:style-name="T20">O(E log E) </text:span><text:span text:style-name="T19">是同一等級，兩種寫法考試都被接受。</text:span></text:p>
          </table:table-cell>
        </table:table-row>
      </table:table>
      <text:p text:style-name="P19" loext:marker-style-name="T18"/>
      <text:p text:style-name="P7" loext:marker-style-name="T18"><text:soft-page-break/><draw:frame draw:style-name="fr2" draw:name="影像3" text:anchor-type="as-char" svg:width="16cm" svg:height="12.234cm" draw:z-index="1"><draw:image xlink:href="Pictures/1000000000000550000003D4E548CBA8.png" xlink:type="simple" xlink:show="embed" xlink:actuate="onLoad" draw:mime-type="image/png"/></draw:frame></text:p>
      <text:p text:style-name="P19" loext:marker-style-name="T1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4" loext:marker-style-name="T69"><text:span text:style-name="T70">✅ </text:span><text:span text:style-name="T71">兩個版本怎麼選？</text:span></text:p>
            <text:p text:style-name="P7" loext:marker-style-name="T18"><text:span text:style-name="T19">稠密圖（</text:span><text:span text:style-name="T20">E ≈ V²</text:span><text:span text:style-name="T19">）：</text:span><text:span text:style-name="T20">O(V²) </text:span><text:span text:style-name="T19">矩陣版更省</text:span></text:p>
            <text:p text:style-name="P23" loext:marker-style-name="T61"><text:span text:style-name="T62">因為 </text:span><text:span text:style-name="T63">O(E log V) ≈ O(V² log V) </text:span><text:span text:style-name="T62">反而更慢</text:span></text:p>
            <text:p text:style-name="P7" loext:marker-style-name="T18"><text:span text:style-name="T19">稀疏∼一般圖（</text:span><text:span text:style-name="T20">E &lt;&lt; V²</text:span><text:span text:style-name="T19">）：</text:span><text:span text:style-name="T20">O(E log V) Heap </text:span><text:span text:style-name="T19">版更快</text:span></text:p>
            <text:p text:style-name="P38" loext:marker-style-name="T54"><text:span text:style-name="T55">判斷標準：</text:span><text:span text:style-name="T192">E </text:span><text:span text:style-name="T193">接近 </text:span><text:span text:style-name="T192">V² → </text:span><text:span text:style-name="T193">用矩陣；</text:span><text:span text:style-name="T192">E </text:span><text:span text:style-name="T193">遠小於 </text:span><text:span text:style-name="T192">V² → </text:span><text:span text:style-name="T193">用 </text:span><text:span text:style-name="T192">Heap</text:span></text:p>
          </table:table-cell>
        </table:table-row>
      </table:table>
      <text:p text:style-name="P5"/>
      <text:p text:style-name="P7" loext:marker-style-name="T18"><draw:frame draw:style-name="fr2" draw:name="影像4" text:anchor-type="as-char" svg:width="16cm" svg:height="8.941cm" draw:z-index="2"><draw:image xlink:href="Pictures/1000000000000550000002F8B3BF8B36.png" xlink:type="simple" xlink:show="embed" xlink:actuate="onLoad" draw:mime-type="image/png"/></draw:frame></text:p>
      <text:p text:style-name="P19" loext:marker-style-name="T18"/>
      <text:p text:style-name="Standard"><text:soft-page-break/></text:p>
      <text:h text:style-name="P8" text:outline-level="1" loext:marker-style-name="T21"><text:span text:style-name="T22">四、</text:span><text:span text:style-name="T21">Kruskal </text:span><text:span text:style-name="T22">演算法 ── 從邊開始，最小邊優先</text:span></text:h>
      <text:p text:style-name="P5"/>
      <text:h text:style-name="P9" text:outline-level="2" loext:marker-style-name="T23"><text:span text:style-name="T23">4-1 </text:span><text:span text:style-name="T24">核心概念（超新手版解釋）</text:span></text:h>
      <text:p text:style-name="P5"/>
      <text:p text:style-name="P11" loext:marker-style-name="T30"><text:span text:style-name="T31">還記得 </text:span><text:span text:style-name="T32">Prim </text:span><text:span text:style-name="T31">嗎？它像種一棵樹：先挑一個起點，再讓這棵樹一點一點往外長大。</text:span><text:span text:style-name="T32">Kruskal </text:span><text:span text:style-name="T31">的想法剛好相反 ── 它一開始連一棵樹都沒有，也完全不在乎「樹現在長在哪」。它眼裡只有「邊」，腦袋裡只有一句話：</text:span></text:p>
      <text:p text:style-name="P11" loext:marker-style-name="T30"><text:span text:style-name="T31">「把全世界最便宜的邊，一條一條撿起來；只要撿了不會繞成圈，就留著。」</text:span><text:span text:style-name="T30"/></text:p>
      <text:p text:style-name="P11" loext:marker-style-name="T30"><text:span text:style-name="T31">就這麼簡單。</text:span><text:span text:style-name="T32">Kruskal </text:span><text:span text:style-name="T31">不挑起點、不管順序、也不在乎現在散落著幾棵小樹，它從頭到尾只做一件事 ── 貪心地撿便宜，撿到不能再撿為止。</text:span></text:p>
      <text:p text:style-name="P5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6" loext:marker-style-name="T25"><text:span text:style-name="T26">Kruskal </text:span><text:span text:style-name="T27">的完整流程（背這張就夠了）：</text:span></text:p>
            <text:p text:style-name="P7" loext:marker-style-name="T18"><text:span text:style-name="T19">第 </text:span><text:span text:style-name="T20">0 </text:span><text:span text:style-name="T19">步：先把所有的邊，依權重「由小到大」排成一排。</text:span></text:p>
            <text:p text:style-name="P7" loext:marker-style-name="T18"><text:span text:style-name="T19">然後從最便宜的那條開始，一條一條拿起來，每條都只問同一個問題：它接上去會不會繞成圈？</text:span><text:span text:style-name="T18"/></text:p>
          </table:table-cell>
        </table:table-row>
        <table:table-row table:style-name="表格34.1">
          <table:table-cell table:style-name="表格34.A2" office:value-type="string">
            <text:p text:style-name="P44" loext:marker-style-name="T99"><text:span text:style-name="T99"><text:s text:c="8"/>拿出目前最便宜的一條邊</text:span><text:span text:style-name="T99"/></text:p>
            <text:p text:style-name="P44" loext:marker-style-name="T99"><text:span text:style-name="T99"><text:s text:c="16"/>↓</text:span><text:span text:style-name="T99"/></text:p>
            <text:p text:style-name="P44" loext:marker-style-name="T99"><text:span text:style-name="T99"><text:s text:c="10"/>接上去會繞成圈嗎？</text:span><text:span text:style-name="T99"/></text:p>
            <text:p text:style-name="P44" loext:marker-style-name="T99"><text:span text:style-name="T99"><text:s text:c="13"/>/ <text:s text:c="9"/>\</text:span><text:span text:style-name="T99"/></text:p>
            <text:p text:style-name="P44" loext:marker-style-name="T99"><text:span text:style-name="T99"><text:s text:c="11"/>不會 <text:s text:c="9"/>會</text:span><text:span text:style-name="T99"/></text:p>
            <text:p text:style-name="P44" loext:marker-style-name="T99"><text:span text:style-name="T99"><text:s text:c="12"/>↓ <text:s text:c="11"/>↓</text:span><text:span text:style-name="T99"/></text:p>
            <text:p text:style-name="P44" loext:marker-style-name="T99"><text:span text:style-name="T99"><text:s text:c="8"/>收下，加入 <text:s text:c="6"/>丟掉，不要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3"/>重複到「已收下 V-1 條邊」為止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9"/>MST 完成！</text:span><text:span text:style-name="T99"/></text:p>
          </table:table-cell>
        </table:table-row>
      </table:table>
      <text:p text:style-name="P5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Kruskal ── </text:span><text:span text:style-name="T19">把邊由小到大排好，一條一條撿，不繞圈就收下。</text:span></text:p>
          </table:table-cell>
        </table:table-row>
      </table:table>
      <text:p text:style-name="P5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6" loext:marker-style-name="T25"><text:span text:style-name="T27">為什麼「每次撿最便宜」最後剛好會最省？</text:span><text:span text:style-name="T25"/></text:p>
            <text:p text:style-name="P7" loext:marker-style-name="T18"><text:span text:style-name="T19">你可能會擔心：每次只顧眼前最便宜，會不會撿到後面反而虧？</text:span><text:span text:style-name="T18"/></text:p>
            <text:p text:style-name="P7" loext:marker-style-name="T18"><text:span text:style-name="T19">直覺是這樣：任何時刻，圖上的點都被分成「已經連起來的那幾坨」。要把其中兩坨接在一起，當然挑「跨在它們之間、最便宜的那條邊」最划算，挑貴的一定吃虧。</text:span><text:span text:style-name="T18"/></text:p>
            <text:p text:style-name="P7" loext:marker-style-name="T18"><text:span text:style-name="T19">而 </text:span><text:span text:style-name="T20">Kruskal </text:span><text:span text:style-name="T19">由小到大撿邊，等於每一步都在挑「跨越某條分界的最便宜邊」，所以從頭到尾都不吃虧，最後加起來自然最省。（課本把這個保證叫 </text:span><text:span text:style-name="T20">Cut Property</text:span><text:span text:style-name="T19">，切割性質。）</text:span></text:p>
          </table:table-cell>
        </table:table-row>
      </table:table>
      <text:p text:style-name="P5"/>
      <text:h text:style-name="P9" text:outline-level="2" loext:marker-style-name="T23"><text:span text:style-name="T23">4-2 </text:span><text:span text:style-name="T24">完整圖解範例（先用「人工」走一遍，不靠任何工具）</text:span></text:h>
      <text:p text:style-name="P5"/>
      <text:p text:style-name="P11" loext:marker-style-name="T30"><text:span text:style-name="T31">我們先完全不用電腦、不用任何資料結構，純粹拿筆把點「分組」，手動走一次。走完你會徹底明白 </text:span><text:span text:style-name="T32">Kruskal </text:span><text:span text:style-name="T31">在做什麼，也會自然發現一個很麻煩的地方 ── 那正是下一節 </text:span><text:span text:style-name="T32">Union-Find </text:span><text:span text:style-name="T31">要登場的理由。</text:span></text:p>
      <text:p text:style-name="P11" loext:marker-style-name="T30"><text:span text:style-name="T31">範例圖：</text:span><text:span text:style-name="T32">AB=1</text:span><text:span text:style-name="T31">、</text:span><text:span text:style-name="T32">BC=2</text:span><text:span text:style-name="T31">、</text:span><text:span text:style-name="T32">CD=3</text:span><text:span text:style-name="T31">、</text:span><text:span text:style-name="T32">AC=4</text:span><text:span text:style-name="T31">、</text:span><text:span text:style-name="T32">BD=5</text:span><text:span text:style-name="T31">、</text:span><text:span text:style-name="T32">DE=6</text:span><text:span text:style-name="T31">、</text:span><text:span text:style-name="T32">CE=8</text:span><text:span text:style-name="T31">（比 </text:span><text:span text:style-name="T32">Prim </text:span><text:span text:style-name="T31">那張多了一個點 </text:span><text:span text:style-name="T32">E</text:span><text:span text:style-name="T31">、也多了幾條邊，這樣才看得出「跳過」是怎麼發生的）。</text:span></text:p>
      <text:p text:style-name="P5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44" loext:marker-style-name="T99"><text:span text:style-name="T99">原始圖： <text:s text:c="9"/>A</text:span><text:span text:style-name="T99"/></text:p>
            <text:p text:style-name="P44" loext:marker-style-name="T99"><text:span text:style-name="T99"><text:s text:c="16"/>/ \</text:span><text:span text:style-name="T99"/></text:p>
            <text:p text:style-name="P44" loext:marker-style-name="T99"><text:soft-page-break/><text:span text:style-name="T99"><text:s text:c="15"/>1 <text:s text:c="2"/>4</text:span><text:span text:style-name="T99"/></text:p>
            <text:p text:style-name="P44" loext:marker-style-name="T99"><text:span text:style-name="T99"><text:s text:c="14"/>/ <text:s text:c="4"/>\</text:span><text:span text:style-name="T99"/></text:p>
            <text:p text:style-name="P44" loext:marker-style-name="T99"><text:span text:style-name="T99"><text:s text:c="13"/>B --2-- C --8-- E</text:span><text:span text:style-name="T99"/></text:p>
            <text:p text:style-name="P44"><text:span text:style-name="T99"><text:s text:c="14"/>\ <text:s text:c="4"/>/</text:span></text:p>
            <text:p text:style-name="P44" loext:marker-style-name="T99"><text:span text:style-name="T99"><text:s text:c="15"/>5 <text:s text:c="2"/>3</text:span><text:span text:style-name="T99"/></text:p>
            <text:p text:style-name="P44" loext:marker-style-name="T99"><text:span text:style-name="T99"><text:s text:c="16"/>\ /</text:span><text:span text:style-name="T99"/></text:p>
            <text:p text:style-name="P44" loext:marker-style-name="T99"><text:span text:style-name="T99"><text:s text:c="17"/>D --6-- E</text:span><text:span text:style-name="T99"/></text:p>
            <text:p text:style-name="P44"/>
            <text:p text:style-name="P44" loext:marker-style-name="T99"><text:span text:style-name="T99">所有邊排序（由小到大）：AB=1, BC=2, CD=3, AC=4, BD=5, DE=6, CE=8</text:span><text:span text:style-name="T99"/></text:p>
          </table:table-cell>
        </table:table-row>
      </table:table>
      <text:p text:style-name="P5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4" loext:marker-style-name="T81"><text:span text:style-name="T83">Step 1</text:span><text:span text:style-name="T82">：拿最小邊 </text:span><text:span text:style-name="T83">AB = 1</text:span></text:p>
            <text:p text:style-name="P32" loext:marker-style-name="T99"><text:span text:style-name="T99">目前分組：{A} {B} {C} {D} {E} <text:s text:c="3"/>← 還有 5 坨</text:span><text:span text:style-name="T99"/></text:p>
            <text:p text:style-name="P32" loext:marker-style-name="T99"><text:span text:style-name="T99">A 在 {A}、B 在 {B} → 不同坨 → 接上去不會繞圈 → 收下！</text:span><text:span text:style-name="T99"/></text:p>
            <text:p text:style-name="P32" loext:marker-style-name="T99"><text:span text:style-name="T99">合併後：{A,B} {C} {D} {E} <text:s text:c="7"/>← 剩 4 坨</text:span><text:span text:style-name="T99"/></text:p>
            <text:p text:style-name="P32" loext:marker-style-name="T99"><text:span text:style-name="T99">已收邊：AB（1 條）</text:span><text:span text:style-name="T99"/></text:p>
          </table:table-cell>
        </table:table-row>
        <table:table-row table:style-name="表格38.1">
          <table:table-cell table:style-name="表格38.A1" office:value-type="string">
            <text:p text:style-name="P24" loext:marker-style-name="T81"><text:span text:style-name="T83">Step 2</text:span><text:span text:style-name="T82">：拿次小邊 </text:span><text:span text:style-name="T83">BC = 2</text:span></text:p>
            <text:p text:style-name="P32" loext:marker-style-name="T99"><text:span text:style-name="T99">目前分組：{A,B} {C} {D} {E}</text:span><text:span text:style-name="T99"/></text:p>
            <text:p text:style-name="P32" loext:marker-style-name="T99"><text:span text:style-name="T99">B 在 {A,B}、C 在 {C} → 不同坨 → 收下！</text:span><text:span text:style-name="T99"/></text:p>
            <text:p text:style-name="P32" loext:marker-style-name="T99"><text:span text:style-name="T99">合併後：{A,B,C} {D} {E} <text:s text:c="9"/>← 剩 3 坨</text:span><text:span text:style-name="T99"/></text:p>
            <text:p text:style-name="P32" loext:marker-style-name="T99"><text:span text:style-name="T99">已收邊：AB, BC（2 條）</text:span><text:span text:style-name="T99"/></text:p>
          </table:table-cell>
        </table:table-row>
        <table:table-row table:style-name="表格38.1">
          <table:table-cell table:style-name="表格38.A1" office:value-type="string">
            <text:p text:style-name="P24" loext:marker-style-name="T81"><text:span text:style-name="T83">Step 3</text:span><text:span text:style-name="T82">：拿 </text:span><text:span text:style-name="T83">CD = 3</text:span></text:p>
            <text:p text:style-name="P32" loext:marker-style-name="T99"><text:span text:style-name="T99">目前分組：{A,B,C} {D} {E}</text:span><text:span text:style-name="T99"/></text:p>
            <text:p text:style-name="P32" loext:marker-style-name="T99"><text:span text:style-name="T99">C 在 {A,B,C}、D 在 {D} → 不同坨 → 收下！</text:span><text:span text:style-name="T99"/></text:p>
            <text:p text:style-name="P32" loext:marker-style-name="T99"><text:span text:style-name="T99">合併後：{A,B,C,D} {E} <text:s text:c="11"/>← 剩 2 坨</text:span><text:span text:style-name="T99"/></text:p>
            <text:p text:style-name="P32" loext:marker-style-name="T99"><text:span text:style-name="T99">已收邊：AB, BC, CD（3 條）</text:span><text:span text:style-name="T99"/></text:p>
          </table:table-cell>
        </table:table-row>
        <table:table-row table:style-name="表格38.1">
          <table:table-cell table:style-name="表格38.A4" office:value-type="string">
            <text:p text:style-name="P24" loext:marker-style-name="T40"><text:span text:style-name="T41">Step 4</text:span><text:span text:style-name="T42">：拿 </text:span><text:span text:style-name="T41">AC = 4 → ⛔ </text:span><text:span text:style-name="T42">跳過</text:span></text:p>
            <text:p text:style-name="P32" loext:marker-style-name="T99"><text:span text:style-name="T99">目前分組：{A,B,C,D} {E}</text:span><text:span text:style-name="T99"/></text:p>
            <text:p text:style-name="P32" loext:marker-style-name="T99"><text:span text:style-name="T99">A 和 C 已經都在 {A,B,C,D} 同一坨 → 接上去會繞圈！</text:span><text:span text:style-name="T99"/></text:p>
            <text:p text:style-name="P32" loext:marker-style-name="T99"><text:span text:style-name="T99">（A─B─C 早就連通了，再加一條 A─C 就湊成三角形）</text:span><text:span text:style-name="T99"/></text:p>
            <text:p text:style-name="P32" loext:marker-style-name="T99"><text:span text:style-name="T99">⛔ 丟掉 AC = 4</text:span><text:span text:style-name="T99"/></text:p>
          </table:table-cell>
        </table:table-row>
        <table:table-row table:style-name="表格38.1">
          <table:table-cell table:style-name="表格38.A4" office:value-type="string">
            <text:p text:style-name="P24" loext:marker-style-name="T40"><text:span text:style-name="T41">Step 5</text:span><text:span text:style-name="T42">：拿 </text:span><text:span text:style-name="T41">BD = 5 → ⛔ </text:span><text:span text:style-name="T42">跳過</text:span></text:p>
            <text:p text:style-name="P32" loext:marker-style-name="T99"><text:span text:style-name="T99">目前分組：{A,B,C,D} {E}</text:span><text:span text:style-name="T99"/></text:p>
            <text:p text:style-name="P32" loext:marker-style-name="T99"><text:span text:style-name="T99">B 和 D 也都在同一坨（B─C─D 早就相連）→ 會繞圈</text:span><text:span text:style-name="T99"/></text:p>
            <text:p text:style-name="P32" loext:marker-style-name="T99"><text:span text:style-name="T99">⛔ 丟掉 BD = 5</text:span><text:span text:style-name="T99"/></text:p>
          </table:table-cell>
        </table:table-row>
        <table:table-row table:style-name="表格38.1">
          <table:table-cell table:style-name="表格38.A1" office:value-type="string">
            <text:p text:style-name="P24" loext:marker-style-name="T81"><text:span text:style-name="T83">Step 6</text:span><text:span text:style-name="T82">：拿 </text:span><text:span text:style-name="T83">DE = 6 ← </text:span><text:span text:style-name="T82">最後一條</text:span></text:p>
            <text:p text:style-name="P32" loext:marker-style-name="T99"><text:span text:style-name="T99">目前分組：{A,B,C,D} {E}</text:span><text:span text:style-name="T99"/></text:p>
            <text:p text:style-name="P32" loext:marker-style-name="T99"><text:span text:style-name="T99">D 在 {A,B,C,D}、E 在 {E} → 不同坨 → 收下！</text:span><text:span text:style-name="T99"/></text:p>
            <text:p text:style-name="P32" loext:marker-style-name="T99"><text:span text:style-name="T99">合併後：{A,B,C,D,E} <text:s text:c="12"/>← 只剩 1 坨，全部連通！</text:span><text:span text:style-name="T99"/></text:p>
            <text:p text:style-name="P32" loext:marker-style-name="T99"><text:span text:style-name="T99">已收邊：AB, BC, CD, DE（4 條 = V-1 ✅）</text:span><text:span text:style-name="T99"/></text:p>
          </table:table-cell>
        </table:table-row>
        <table:table-row table:style-name="表格38.1">
          <table:table-cell table:style-name="表格38.A7" office:value-type="string">
            <text:p text:style-name="P24" loext:marker-style-name="T47"><text:span text:style-name="T48">✅ MST </text:span><text:span text:style-name="T49">完成</text:span></text:p>
            <text:p text:style-name="P16" loext:marker-style-name="T18"><text:span text:style-name="T20">MST </text:span><text:span text:style-name="T19">邊集合：</text:span><text:span text:style-name="T20">AB=1, BC=2, CD=3, DE=6</text:span></text:p>
            <text:p text:style-name="P16" loext:marker-style-name="T66"><text:span text:style-name="T67">總權重：</text:span><text:span text:style-name="T68">1 + 2 + 3 + 6 = 12</text:span></text:p>
            <text:p text:style-name="P40" loext:marker-style-name="T18"><text:span text:style-name="T19">邊數驗證：</text:span><text:span text:style-name="T20">V-1 = 5-1 = 4 </text:span><text:span text:style-name="T19">條 ✅</text:span></text:p>
          </table:table-cell>
        </table:table-row>
      </table:table>
      <text:p text:style-name="P5"/>
      <text:h text:style-name="P9" text:outline-level="2" loext:marker-style-name="T23"><text:span text:style-name="T23">4-3 </text:span><text:span text:style-name="T24">那個很煩的判斷 → 用 </text:span><text:span text:style-name="T23">Union-Find</text:span><text:span text:style-name="T24">（並查集）自動化</text:span></text:h>
      <text:p text:style-name="P5"/>
      <text:p text:style-name="P11" loext:marker-style-name="T30"><text:span text:style-name="T31">回頭看上面六步，真正花腦力的其實只有一件事：每拿一條邊，都得判斷「這兩個端點，是不是已經在同一坨了？」── 同一坨就會繞圈、必須跳過；不同坨才能收。</text:span><text:span text:style-name="T30"/></text:p>
      <text:p text:style-name="P11" loext:marker-style-name="T30"><text:span text:style-name="T32">5 </text:span><text:span text:style-name="T31">個點用眼睛分還行；但考題動輒 </text:span><text:span text:style-name="T32">10</text:span><text:span text:style-name="T31">、</text:span><text:span text:style-name="T32">20 </text:span><text:span text:style-name="T31">個點，邊密密麻麻，用眼睛追蹤每個點屬於哪一坨，既慢又容易看錯。我們需要一個能「秒答兩點是否同坨」的小工具 ── 它就是 </text:span><text:span text:style-name="T32">Union-Find</text:span><text:span text:style-name="T31">（並查集）。</text:span></text:p>
      <text:p text:style-name="P5"/>
      <table:table table:name="表格39" table:style-name="表格39">
        <table:table-column table:style-name="表格39.A"/>
        <text:soft-page-break/>
        <table:table-row table:style-name="表格39.1">
          <table:table-cell table:style-name="表格39.A1" office:value-type="string">
            <text:p text:style-name="P6" loext:marker-style-name="T25"><text:span text:style-name="T26">Union-Find </text:span><text:span text:style-name="T27">只做兩件事：</text:span></text:p>
            <text:p text:style-name="P7" loext:marker-style-name="T18"><text:span text:style-name="T20">Find(x)</text:span><text:span text:style-name="T19">：問「</text:span><text:span text:style-name="T20">x </text:span><text:span text:style-name="T19">現在屬於哪一坨？」（回傳那一坨的代表人）。</text:span></text:p>
            <text:p text:style-name="P7" loext:marker-style-name="T18"><text:span text:style-name="T20">Union(x, y)</text:span><text:span text:style-name="T19">：把 </text:span><text:span text:style-name="T20">x </text:span><text:span text:style-name="T19">和 </text:span><text:span text:style-name="T20">y </text:span><text:span text:style-name="T19">各自的那一坨，合併成一坨。</text:span></text:p>
            <text:p text:style-name="P7" loext:marker-style-name="T18"><text:span text:style-name="T19">對應到 </text:span><text:span text:style-name="T20">Kruskal</text:span><text:span text:style-name="T19">：用 </text:span><text:span text:style-name="T20">Find </text:span><text:span text:style-name="T19">判斷會不會繞圈，用 </text:span><text:span text:style-name="T20">Union </text:span><text:span text:style-name="T19">在收邊時合併兩坨。</text:span></text:p>
          </table:table-cell>
        </table:table-row>
      </table:table>
      <text:p text:style-name="P5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44" loext:marker-style-name="T230"><text:span text:style-name="T230">【Find 操作】：找到某個節點的代表人</text:span><text:span text:style-name="T230"/></text:p>
            <text:p text:style-name="P44" loext:marker-style-name="T99"><text:span text:style-name="T99">初始狀態：</text:span><text:span text:style-name="T231">每個節點自己代表自己</text:span></text:p>
            <text:p text:style-name="P44" loext:marker-style-name="T99"><text:span text:style-name="T99">節點： <text:s/>A <text:s text:c="3"/>B <text:s text:c="3"/>C <text:s text:c="3"/>D <text:s text:c="3"/>E</text:span><text:span text:style-name="T99"/></text:p>
            <text:p text:style-name="P44" loext:marker-style-name="T99"><text:span text:style-name="T99">代表： <text:s/>A <text:s text:c="3"/>B <text:s text:c="3"/>C <text:s text:c="3"/>D <text:s text:c="3"/>E <text:s text:c="2"/>（每人自己是代表）</text:span><text:span text:style-name="T99"/></text:p>
            <text:p text:style-name="P44" loext:marker-style-name="T99"><text:span text:style-name="T99">集合：{A} <text:s/>{B} <text:s/>{C} <text:s/>{D} <text:s/>{E}</text:span><text:span text:style-name="T99"/></text:p>
            <text:p text:style-name="P44" loext:marker-style-name="T99"><text:span text:style-name="T99">─────────────────────────────────────────────────────────</text:span><text:span text:style-name="T99"/></text:p>
            <text:p text:style-name="P44" loext:marker-style-name="T230"><text:span text:style-name="T230">【Union 操作】：合併兩個節點所在的組</text:span><text:span text:style-name="T230"/></text:p>
            <text:p text:style-name="P44" loext:marker-style-name="T99"><text:span text:style-name="T232">Union(A, B)：把 A 的組和 B 的組合併</text:span><text:span text:style-name="T99"> → </text:span><text:span text:style-name="T231">B 的代表改成 A</text:span></text:p>
            <text:p text:style-name="P44" loext:marker-style-name="T99"><text:span text:style-name="T99">節點： <text:s/>A <text:s text:c="3"/>B <text:s text:c="3"/>C <text:s text:c="3"/>D <text:s text:c="3"/>E</text:span><text:span text:style-name="T99"/></text:p>
            <text:p text:style-name="P44" loext:marker-style-name="T99"><text:span text:style-name="T99">代表： <text:s/>A <text:s text:c="3"/></text:span><text:span text:style-name="T233">A</text:span><text:span text:style-name="T99"> <text:s text:c="3"/>C <text:s text:c="3"/>D <text:s text:c="3"/>E <text:s text:c="2"/>← B 的代表變成 A</text:span></text:p>
            <text:p text:style-name="P44" loext:marker-style-name="T99"><text:span text:style-name="T99">集合：</text:span><text:span text:style-name="T233">{A,B}</text:span><text:span text:style-name="T99"> <text:s/>{C} <text:s/>{D} <text:s/>{E}</text:span></text:p>
            <text:p text:style-name="P44" loext:marker-style-name="T99"><text:span text:style-name="T234">Union(C, D)</text:span><text:span text:style-name="T99">：集合：{A,B} <text:s/></text:span><text:span text:style-name="T233">{C,D}</text:span><text:span text:style-name="T99"> <text:s/>{E}</text:span></text:p>
            <text:p text:style-name="P44" loext:marker-style-name="T99"><text:span text:style-name="T235">Union(B, C)</text:span><text:span text:style-name="T99">：</text:span><text:span text:style-name="T236">Find(B)=A，Find(C)=C</text:span><text:span text:style-name="T99">，</text:span><text:span text:style-name="T237">不同 → 合併</text:span></text:p>
            <text:p text:style-name="P44" loext:marker-style-name="T99"><text:span text:style-name="T99">集合：{A,B,C,D} <text:s/>{E}</text:span><text:span text:style-name="T99"/></text:p>
            <text:p text:style-name="P44" loext:marker-style-name="T99"><text:span text:style-name="T99">問：</text:span><text:span text:style-name="T238">Union(A, D)？</text:span></text:p>
            <text:p text:style-name="P44" loext:marker-style-name="T99"><text:span text:style-name="T239">Find(A)=A，Find(D)=A</text:span><text:span text:style-name="T99"> → </text:span><text:span text:style-name="T240">相同！→ 跳過，加了會成環！</text:span></text:p>
            <text:p text:style-name="P44" loext:marker-style-name="T99"><text:span text:style-name="T99">───────────────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核心口訣：</text:span><text:span text:style-name="T241">同集合 → 跳過（會成環）</text:span><text:span text:style-name="T99"> <text:s/></text:span><text:span text:style-name="T242">不同集合 → 合併（加入 MST）</text:span></text:p>
          </table:table-cell>
        </table:table-row>
      </table:table>
      <text:p text:style-name="P5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6" loext:marker-style-name="T25"><text:span text:style-name="T26">Kruskal × Union-Find</text:span><text:span text:style-name="T27">：完整對應</text:span></text:p>
            <text:p text:style-name="P7" loext:marker-style-name="T18"><text:span text:style-name="T20">① </text:span><text:span text:style-name="T19">依序拿出已排好的最便宜邊 </text:span><text:span text:style-name="T20">(u, v)</text:span><text:span text:style-name="T19">。</text:span></text:p>
            <text:p text:style-name="P7" loext:marker-style-name="T18"><text:span text:style-name="T20">② </text:span><text:span text:style-name="T19">算 </text:span><text:span text:style-name="T20">Find(u) </text:span><text:span text:style-name="T19">和 </text:span><text:span text:style-name="T20">Find(v)</text:span><text:span text:style-name="T19">。</text:span></text:p>
            <text:p text:style-name="P7" loext:marker-style-name="T18"><text:span text:style-name="T20">③ </text:span><text:span text:style-name="T19">兩者不同（不同坨）→ 收下這條邊，並 </text:span><text:span text:style-name="T20">Union(u, v) </text:span><text:span text:style-name="T19">合併。</text:span></text:p>
            <text:p text:style-name="P7" loext:marker-style-name="T18"><text:span text:style-name="T20">④ </text:span><text:span text:style-name="T19">兩者相同（同坨）→ 跳過（加了會繞圈）。</text:span></text:p>
            <text:p text:style-name="P7" loext:marker-style-name="T18"><text:span text:style-name="T20">⑤ </text:span><text:span text:style-name="T19">收滿 </text:span><text:span text:style-name="T20">V-1 </text:span><text:span text:style-name="T19">條邊就結束，</text:span><text:span text:style-name="T20">MST </text:span><text:span text:style-name="T19">完成。</text:span></text:p>
          </table:table-cell>
        </table:table-row>
      </table:table>
      <text:p text:style-name="P5"/>
      <text:h text:style-name="P9" text:outline-level="2" loext:marker-style-name="T23"><text:span text:style-name="T23">4-4 Kruskal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pan text:style-name="T31">把上面的流程寫成虛擬碼，乾淨又好背 ── 考試手寫演算法時，照這個架構寫就對了。</text:span><text:span text:style-name="T30"/></text:p>
      <text:p text:style-name="P5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42" loext:marker-style-name="T172"><text:span text:style-name="T172">// Kruskal </text:span><text:span text:style-name="T173">主演算法</text:span></text:p>
            <text:p text:style-name="P42" loext:marker-style-name="T169"><text:span text:style-name="T169">KRUSKAL(V, E):</text:span><text:span text:style-name="T169"/></text:p>
            <text:p text:style-name="P42" loext:marker-style-name="T169"><text:span text:style-name="T169"><text:s text:c="4"/></text:span><text:span text:style-name="T171">將 </text:span><text:span text:style-name="T169">E </text:span><text:span text:style-name="T171">中所有邊，依權重 </text:span><text:span text:style-name="T169">w </text:span><text:span text:style-name="T171">由小到大排序</text:span></text:p>
            <text:p text:style-name="P42" loext:marker-style-name="T169"><text:span text:style-name="T169"><text:s text:c="4"/>for each </text:span><text:span text:style-name="T171">節點 </text:span><text:span text:style-name="T169">v in V:</text:span></text:p>
            <text:p text:style-name="P42" loext:marker-style-name="T169"><text:span text:style-name="T169"><text:s text:c="8"/>MAKE-SET(v) <text:s text:c="13"/>// </text:span><text:span text:style-name="T171">每個點自成一坨</text:span></text:p>
            <text:p text:style-name="P42" loext:marker-style-name="T169"><text:span text:style-name="T169"><text:s text:c="4"/>MST <text:s text:c="2"/>← { } <text:s text:c="17"/>// </text:span><text:span text:style-name="T171">存放選到的邊</text:span></text:p>
            <text:p text:style-name="P42" loext:marker-style-name="T169"><text:span text:style-name="T169"><text:s text:c="4"/>total ← 0 <text:s text:c="19"/>// </text:span><text:span text:style-name="T171">累計權重</text:span></text:p>
            <text:p text:style-name="P45" loext:marker-style-name="T169"/>
            <text:p text:style-name="P42" loext:marker-style-name="T169"><text:span text:style-name="T169"><text:s text:c="4"/>for each </text:span><text:span text:style-name="T171">邊 </text:span><text:span text:style-name="T169">(u, v, w) in E </text:span><text:span text:style-name="T171">（依權重由小到大）</text:span><text:span text:style-name="T169">:</text:span></text:p>
            <text:p text:style-name="P42" loext:marker-style-name="T169"><text:span text:style-name="T169"><text:s text:c="8"/>if FIND(u) ≠ FIND(v): <text:s text:c="3"/>// </text:span><text:span text:style-name="T171">不同坨 → 不會繞圈</text:span></text:p>
            <text:p text:style-name="P42" loext:marker-style-name="T169"><text:span text:style-name="T169"><text:s text:c="12"/></text:span><text:span text:style-name="T171">將 </text:span><text:span text:style-name="T169">(u, v) </text:span><text:span text:style-name="T171">加入 </text:span><text:span text:style-name="T169">MST</text:span></text:p>
            <text:p text:style-name="P42" loext:marker-style-name="T169"><text:span text:style-name="T169"><text:s text:c="12"/>total ← total + w</text:span><text:span text:style-name="T169"/></text:p>
            <text:p text:style-name="P42" loext:marker-style-name="T169"><text:span text:style-name="T169"><text:s text:c="12"/>UNION(u, v) <text:s text:c="9"/>// </text:span><text:span text:style-name="T171">合併兩坨</text:span></text:p>
            <text:p text:style-name="P42" loext:marker-style-name="T169"><text:span text:style-name="T169"><text:s text:c="8"/>if |MST| = V − 1: <text:s text:c="7"/>// </text:span><text:span text:style-name="T171">已收滿 </text:span><text:span text:style-name="T169">V−1 </text:span><text:span text:style-name="T171">條，結束</text:span></text:p>
            <text:p text:style-name="P42" loext:marker-style-name="T169"><text:span text:style-name="T169"><text:s text:c="12"/>break</text:span><text:span text:style-name="T169"/></text:p>
            <text:p text:style-name="P45" loext:marker-style-name="T169"/>
            <text:p text:style-name="P42" loext:marker-style-name="T169"><text:span text:style-name="T169"><text:s text:c="4"/>return MST, total</text:span><text:span text:style-name="T169"/></text:p>
          </table:table-cell>
        </table:table-row>
        <table:table-row table:style-name="表格42.1">
          <table:table-cell table:style-name="表格42.A1" office:value-type="string">
            <text:p text:style-name="P42" loext:marker-style-name="T172"><text:span text:style-name="T172">// Union-Find</text:span><text:span text:style-name="T173">（並查集）：三個基本操作</text:span></text:p>
            <text:p text:style-name="P42" loext:marker-style-name="T169"><text:soft-page-break/><text:span text:style-name="T169">MAKE-SET(x):</text:span><text:span text:style-name="T169"/></text:p>
            <text:p text:style-name="P42" loext:marker-style-name="T169"><text:span text:style-name="T169"><text:s text:c="4"/>parent[x] ← x <text:s text:c="15"/>// </text:span><text:span text:style-name="T171">一開始自己是自己的代表</text:span></text:p>
            <text:p text:style-name="P45" loext:marker-style-name="T169"/>
            <text:p text:style-name="P42" loext:marker-style-name="T169"><text:span text:style-name="T169">FIND(x): <text:s text:c="24"/>// </text:span><text:span text:style-name="T171">找 </text:span><text:span text:style-name="T169">x </text:span><text:span text:style-name="T171">那一坨的代表人</text:span></text:p>
            <text:p text:style-name="P42" loext:marker-style-name="T169"><text:span text:style-name="T169"><text:s text:c="4"/>while parent[x] ≠ x:</text:span><text:span text:style-name="T169"/></text:p>
            <text:p text:style-name="P42" loext:marker-style-name="T169"><text:span text:style-name="T169"><text:s text:c="8"/>x ← parent[x]</text:span><text:span text:style-name="T169"/></text:p>
            <text:p text:style-name="P42" loext:marker-style-name="T169"><text:span text:style-name="T169"><text:s text:c="4"/>return x</text:span><text:span text:style-name="T169"/></text:p>
            <text:p text:style-name="P45" loext:marker-style-name="T169"/>
            <text:p text:style-name="P42" loext:marker-style-name="T169"><text:span text:style-name="T169">UNION(x, y): <text:s text:c="20"/>// </text:span><text:span text:style-name="T171">合併兩坨</text:span></text:p>
            <text:p text:style-name="P42" loext:marker-style-name="T169"><text:span text:style-name="T169"><text:s text:c="4"/>rx ← FIND(x); <text:s/>ry ← FIND(y)</text:span><text:span text:style-name="T169"/></text:p>
            <text:p text:style-name="P42" loext:marker-style-name="T169"><text:span text:style-name="T169"><text:s text:c="4"/>if rx = ry: return <text:s text:c="10"/>// </text:span><text:span text:style-name="T171">本來就同坨，免合併</text:span></text:p>
            <text:p text:style-name="P42" loext:marker-style-name="T169"><text:span text:style-name="T169"><text:s text:c="4"/>parent[rx] ← ry <text:s text:c="13"/>// </text:span><text:span text:style-name="T171">把一坨接到另一坨底下</text:span></text:p>
          </table:table-cell>
        </table:table-row>
      </table:table>
      <text:p text:style-name="P5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" loext:marker-style-name="T54"><text:span text:style-name="T55">考試加分：兩個讓 </text:span><text:span text:style-name="T56">Union-Find </text:span><text:span text:style-name="T55">快到飛起的優化</text:span></text:p>
            <text:p text:style-name="P7" loext:marker-style-name="T18"><text:span text:style-name="T20">① </text:span><text:span text:style-name="T19">路徑壓縮（</text:span><text:span text:style-name="T20">Path Compression</text:span><text:span text:style-name="T19">）：</text:span><text:span text:style-name="T20">FIND </text:span><text:span text:style-name="T19">時順手把沿路經過的點直接指向代表人，下次再查幾乎瞬間完成。</text:span></text:p>
            <text:p text:style-name="P7" loext:marker-style-name="T18"><text:span text:style-name="T20">② </text:span><text:span text:style-name="T19">按秩合併（</text:span><text:span text:style-name="T20">Union by Rank / Size</text:span><text:span text:style-name="T19">）：</text:span><text:span text:style-name="T20">UNION </text:span><text:span text:style-name="T19">時把「矮的那坨」接到「高的那坨」底下，避免樹越接越高。</text:span></text:p>
            <text:p text:style-name="P7" loext:marker-style-name="T18"><text:span text:style-name="T19">兩個一起用，每次 </text:span><text:span text:style-name="T20">Find / Union </text:span><text:span text:style-name="T19">幾乎是 </text:span><text:span text:style-name="T20">O(1)</text:span><text:span text:style-name="T19">（嚴格說是 </text:span><text:span text:style-name="T20">O(α(V))</text:span><text:span text:style-name="T19">，</text:span><text:span text:style-name="T20">α </text:span><text:span text:style-name="T19">是反阿克曼函數，實務上永遠 ≤ </text:span><text:span text:style-name="T20">4</text:span><text:span text:style-name="T19">）。</text:span></text:p>
          </table:table-cell>
        </table:table-row>
      </table:table>
      <text:p text:style-name="P5"/>
      <text:h text:style-name="P9" text:outline-level="2" loext:marker-style-name="T23"><text:span text:style-name="T23">4-5 Kruskal </text:span><text:span text:style-name="T24">時間複雜度 ── 逐步推導</text:span></text:h>
      <text:p text:style-name="P5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6" loext:marker-style-name="T25"><text:span text:style-name="T27">結論：</text:span><text:span text:style-name="T26">Kruskal </text:span><text:span text:style-name="T27">時間複雜度 </text:span><text:span text:style-name="T26">= O(E log E)</text:span></text:p>
            <text:p text:style-name="P7" loext:marker-style-name="T18"><text:span text:style-name="T19">也可寫成 </text:span><text:span text:style-name="T20">O(E log V)</text:span><text:span text:style-name="T19">，兩者在 </text:span><text:span text:style-name="T20">Big-O </text:span><text:span text:style-name="T19">意義下相等（見後文說明）。</text:span></text:p>
          </table:table-cell>
        </table:table-row>
      </table:table>
      <text:p text:style-name="P5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 loext:marker-style-name="T15"><text:span text:style-name="T16">Kruskal </text:span><text:span text:style-name="T17">分成兩個獨立階段：</text:span></text:p>
            <text:p text:style-name="P6" loext:marker-style-name="T81"><text:span text:style-name="T82">階段一：排序所有邊</text:span><text:span text:style-name="T81"/></text:p>
            <text:p text:style-name="P6" loext:marker-style-name="T81"><text:span text:style-name="T82">階段二：用 </text:span><text:span text:style-name="T83">Union-Find </text:span><text:span text:style-name="T82">逐條處理每條邊</text:span></text:p>
          </table:table-cell>
        </table:table-row>
      </table:table>
      <text:p text:style-name="P5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 loext:marker-style-name="T15"><text:span text:style-name="T17">【階段一】排序所有邊 → </text:span><text:span text:style-name="T16">O(E log E)</text:span></text:p>
            <text:p text:style-name="P19" loext:marker-style-name="T18"/>
            <text:p text:style-name="P7" loext:marker-style-name="T18"><text:span text:style-name="T20">Kruskal </text:span><text:span text:style-name="T19">第一步要把圖裡所有 </text:span><text:span text:style-name="T20">E </text:span><text:span text:style-name="T19">條邊按權重由小到大排好。</text:span></text:p>
            <text:p text:style-name="P7" loext:marker-style-name="T18"><text:span text:style-name="T19">排序演算法（</text:span><text:span text:style-name="T20">Merge Sort / Heap Sort </text:span><text:span text:style-name="T19">等）的時間複雜度是 </text:span><text:span text:style-name="T20">O(n log n)</text:span><text:span text:style-name="T19">，</text:span></text:p>
            <text:p text:style-name="P7" loext:marker-style-name="T18"><text:span text:style-name="T19">這裡 </text:span><text:span text:style-name="T20">n </text:span><text:span text:style-name="T19">就是邊數 </text:span><text:span text:style-name="T20">E</text:span><text:span text:style-name="T19">，所以排序花費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直覺理解：</text:span><text:span text:style-name="T63">E </text:span><text:span text:style-name="T62">條邊，每條邊在排序過程中平均被比較 </text:span><text:span text:style-name="T63">log E </text:span><text:span text:style-name="T62">次</text:span></text:p>
            <text:p text:style-name="P23" loext:marker-style-name="T61"><text:span text:style-name="T63">→ </text:span><text:span text:style-name="T62">共 </text:span><text:span text:style-name="T63">E × log E </text:span><text:span text:style-name="T62">次比較 → </text:span><text:span text:style-name="T63">O(E log E)</text:span><text:span text:style-name="T62">。</text:span></text:p>
          </table:table-cell>
        </table:table-row>
      </table:table>
      <text:p text:style-name="P5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6" loext:marker-style-name="T15"><text:span text:style-name="T17">【階段二】</text:span><text:span text:style-name="T16">Union-Find </text:span><text:span text:style-name="T17">處理每條邊 → </text:span><text:span text:style-name="T16">O(E α(V)) ≈ O(E)</text:span></text:p>
            <text:p text:style-name="P19" loext:marker-style-name="T18"/>
            <text:p text:style-name="P7" loext:marker-style-name="T18"><text:span text:style-name="T19">排序後逐條掃描，每條邊做一次 </text:span><text:span text:style-name="T20">Find + </text:span><text:span text:style-name="T19">可能一次 </text:span><text:span text:style-name="T20">Union</text:span><text:span text:style-name="T19">。</text:span></text:p>
            <text:p text:style-name="P19" loext:marker-style-name="T18"/>
            <text:p text:style-name="P6" loext:marker-style-name="T81"><text:span text:style-name="T83">Union-Find </text:span><text:span text:style-name="T82">的兩個關鍵優化：</text:span></text:p>
            <text:p text:style-name="P29" loext:marker-style-name="T91"><text:span text:style-name="T243">① </text:span><text:span text:style-name="T92">路徑壓縮（</text:span><text:span text:style-name="T243">Path Compression</text:span><text:span text:style-name="T92">）</text:span></text:p>
            <text:p text:style-name="P7" loext:marker-style-name="T18"><text:span text:style-name="T20">Find </text:span><text:span text:style-name="T19">時把沿途節點直接指向根，讓下次 </text:span><text:span text:style-name="T20">Find </text:span><text:span text:style-name="T19">更快。</text:span></text:p>
            <text:p text:style-name="P29" loext:marker-style-name="T91"><text:soft-page-break/><text:span text:style-name="T243">② </text:span><text:span text:style-name="T92">按 </text:span><text:span text:style-name="T243">Rank </text:span><text:span text:style-name="T92">合併（</text:span><text:span text:style-name="T243">Union by Rank</text:span><text:span text:style-name="T92">）</text:span></text:p>
            <text:p text:style-name="P7" loext:marker-style-name="T18"><text:span text:style-name="T20">Union </text:span><text:span text:style-name="T19">時把矮樹接到高樹下面，防止樹長太高。</text:span></text:p>
            <text:p text:style-name="P19" loext:marker-style-name="T18"/>
            <text:p text:style-name="P7" loext:marker-style-name="T18"><text:span text:style-name="T19">兩個優化合在一起，每次 </text:span><text:span text:style-name="T20">Find/Union </text:span><text:span text:style-name="T19">幾乎是 </text:span><text:span text:style-name="T20">O(1)——</text:span></text:p>
            <text:p text:style-name="P7" loext:marker-style-name="T18"><text:span text:style-name="T19">嚴格來說是 </text:span><text:span text:style-name="T20">O(α(V))</text:span><text:span text:style-name="T19">，</text:span><text:span text:style-name="T20">α </text:span><text:span text:style-name="T19">是反阿克曼函數，對所有實際情況 </text:span><text:span text:style-name="T20">α(V) ≤ 4</text:span><text:span text:style-name="T19">。</text:span></text:p>
            <text:p text:style-name="P15" loext:marker-style-name="T47"><text:span text:style-name="T48">→ E </text:span><text:span text:style-name="T49">條邊 </text:span><text:span text:style-name="T48">× O(α(V)) ≈ O(E)</text:span></text:p>
          </table:table-cell>
        </table:table-row>
      </table:table>
      <text:p text:style-name="P5"/>
      <table:table table:name="表格48" table:style-name="表格48">
        <table:table-column table:style-name="表格48.A"/>
        <table:table-column table:style-name="表格48.B"/>
        <table:table-column table:style-name="表格48.C"/>
        <table:table-column table:style-name="表格48.D"/>
        <table:table-row table:style-name="表格48.1">
          <table:table-cell table:style-name="表格48.A1" office:value-type="string">
            <text:p text:style-name="P5" loext:marker-style-name="T177"><text:span text:style-name="T178">階段</text:span><text:span text:style-name="T177"/></text:p>
          </table:table-cell>
          <table:table-cell table:style-name="表格48.A1" office:value-type="string">
            <text:p text:style-name="P5" loext:marker-style-name="T177"><text:span text:style-name="T178">操作</text:span><text:span text:style-name="T177"/></text:p>
          </table:table-cell>
          <table:table-cell table:style-name="表格48.A1" office:value-type="string">
            <text:p text:style-name="P5" loext:marker-style-name="T177"><text:span text:style-name="T178">次數</text:span><text:span text:style-name="T177"/></text:p>
          </table:table-cell>
          <table:table-cell table:style-name="表格48.A1" office:value-type="string">
            <text:p text:style-name="P5" loext:marker-style-name="T177"><text:span text:style-name="T178">花費</text:span><text:span text:style-name="T177"/></text:p>
          </table:table-cell>
        </table:table-row>
        <table:table-row table:style-name="表格48.1">
          <table:table-cell table:style-name="表格48.A2" office:value-type="string">
            <text:p text:style-name="P7" loext:marker-style-name="T18"><text:span text:style-name="T20">① </text:span><text:span text:style-name="T19">排序所有邊</text:span></text:p>
          </table:table-cell>
          <table:table-cell table:style-name="表格48.A2" office:value-type="string">
            <text:p text:style-name="P7" loext:marker-style-name="T18"><text:span text:style-name="T19">排序 </text:span><text:span text:style-name="T20">E </text:span><text:span text:style-name="T19">條邊</text:span></text:p>
          </table:table-cell>
          <table:table-cell table:style-name="表格48.A2" office:value-type="string">
            <text:p text:style-name="P7" loext:marker-style-name="T18"><text:span text:style-name="T20">1 </text:span><text:span text:style-name="T19">次</text:span></text:p>
          </table:table-cell>
          <table:table-cell table:style-name="表格48.A2" office:value-type="string">
            <text:p text:style-name="P7" loext:marker-style-name="T18"><text:span text:style-name="T20">O(E log E)</text:span><text:span text:style-name="T18"/></text:p>
          </table:table-cell>
        </table:table-row>
        <table:table-row table:style-name="表格48.1">
          <table:table-cell table:style-name="表格48.A3" office:value-type="string">
            <text:p text:style-name="P7" loext:marker-style-name="T18"><text:span text:style-name="T20">② Find</text:span><text:span text:style-name="T19">（查代表人）</text:span></text:p>
          </table:table-cell>
          <table:table-cell table:style-name="表格48.A3" office:value-type="string">
            <text:p text:style-name="P7" loext:marker-style-name="T18"><text:span text:style-name="T19">每條邊 </text:span><text:span text:style-name="T20">2 </text:span><text:span text:style-name="T19">次</text:span></text:p>
          </table:table-cell>
          <table:table-cell table:style-name="表格48.A3" office:value-type="string">
            <text:p text:style-name="P7" loext:marker-style-name="T18"><text:span text:style-name="T19">共 </text:span><text:span text:style-name="T20">2E </text:span><text:span text:style-name="T19">次</text:span></text:p>
          </table:table-cell>
          <table:table-cell table:style-name="表格48.A3" office:value-type="string">
            <text:p text:style-name="P7" loext:marker-style-name="T18"><text:span text:style-name="T20">O(E α(V)) ≈ O(E)</text:span><text:span text:style-name="T18"/></text:p>
          </table:table-cell>
        </table:table-row>
        <table:table-row table:style-name="表格48.1">
          <table:table-cell table:style-name="表格48.A2" office:value-type="string">
            <text:p text:style-name="P7" loext:marker-style-name="T18"><text:span text:style-name="T20">② Union</text:span><text:span text:style-name="T19">（合併集合）</text:span></text:p>
          </table:table-cell>
          <table:table-cell table:style-name="表格48.A2" office:value-type="string">
            <text:p text:style-name="P7" loext:marker-style-name="T18"><text:span text:style-name="T19">最多 </text:span><text:span text:style-name="T20">V-1 </text:span><text:span text:style-name="T19">次</text:span></text:p>
          </table:table-cell>
          <table:table-cell table:style-name="表格48.A2" office:value-type="string">
            <text:p text:style-name="P7" loext:marker-style-name="T18"><text:span text:style-name="T19">共 </text:span><text:span text:style-name="T20">V-1 </text:span><text:span text:style-name="T19">次</text:span></text:p>
          </table:table-cell>
          <table:table-cell table:style-name="表格48.A2" office:value-type="string">
            <text:p text:style-name="P7" loext:marker-style-name="T18"><text:span text:style-name="T20">O(V α(V)) ≈ O(V)</text:span><text:span text:style-name="T18"/></text:p>
          </table:table-cell>
        </table:table-row>
        <table:table-row table:style-name="表格48.1">
          <table:table-cell table:style-name="表格48.A5" office:value-type="string">
            <text:p text:style-name="P14" loext:marker-style-name="T69"><text:span text:style-name="T71">總計</text:span><text:span text:style-name="T69"/></text:p>
          </table:table-cell>
          <table:table-cell table:style-name="表格48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8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8.A5" office:value-type="string">
            <text:p text:style-name="P14" loext:marker-style-name="T69"><text:span text:style-name="T70">O(E log E) ← </text:span><text:span text:style-name="T71">排序主導</text:span></text:p>
          </table:table-cell>
        </table:table-row>
      </table:table>
      <text:p text:style-name="P5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4" loext:marker-style-name="T54"><text:span text:style-name="T55">為什麼總複雜度由排序主導？</text:span><text:span text:style-name="T54"/></text:p>
            <text:p text:style-name="P7" loext:marker-style-name="T18"><text:span text:style-name="T19">排序花費 </text:span><text:span text:style-name="T20">O(E log E)</text:span><text:span text:style-name="T19">，</text:span><text:span text:style-name="T20">Union-Find </text:span><text:span text:style-name="T19">花費約 </text:span><text:span text:style-name="T20">O(E)</text:span><text:span text:style-name="T19">。</text:span></text:p>
            <text:p text:style-name="P7" loext:marker-style-name="T18"><text:span text:style-name="T20">O(E log E) &gt;&gt; O(E)</text:span><text:span text:style-name="T19">，所以加起來還是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類比：搬家打包花 </text:span><text:span text:style-name="T63">3 </text:span><text:span text:style-name="T62">小時，搬進去只花 </text:span><text:span text:style-name="T63">10 </text:span><text:span text:style-name="T62">分鐘 → 總時間還是 </text:span><text:span text:style-name="T63">3 </text:span><text:span text:style-name="T62">小時。</text:span></text:p>
            <text:p text:style-name="P38" loext:marker-style-name="T54"><text:span text:style-name="T56">→ </text:span><text:span text:style-name="T55">瓶頸（最慢的那段）決定總花費。</text:span></text:p>
          </table:table-cell>
        </table:table-row>
      </table:table>
      <text:p text:style-name="P5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4" loext:marker-style-name="T54"><text:span text:style-name="T56">O(E log E) </text:span><text:span text:style-name="T55">和 </text:span><text:span text:style-name="T56">O(E log V) </text:span><text:span text:style-name="T55">有差嗎？</text:span></text:p>
            <text:p text:style-name="P7" loext:marker-style-name="T18"><text:span text:style-name="T20">E ≤ V(V-1)/2 ≈ V²</text:span><text:span text:style-name="T19">，所以：</text:span></text:p>
            <text:p text:style-name="P29" loext:marker-style-name="T91"><text:span text:style-name="T243">log E ≤ log V² = 2 log V = O(log V)</text:span><text:span text:style-name="T91"/></text:p>
            <text:p text:style-name="P7" loext:marker-style-name="T18"><text:span text:style-name="T19">反過來 </text:span><text:span text:style-name="T20">E ≥ V-1</text:span><text:span text:style-name="T19">，所以 </text:span><text:span text:style-name="T20">log E ≥ log(V-1) ≈ log V</text:span><text:span text:style-name="T19">。</text:span></text:p>
            <text:p text:style-name="P7" loext:marker-style-name="T18"><text:span text:style-name="T20">→ log E </text:span><text:span text:style-name="T19">和 </text:span><text:span text:style-name="T20">log V </text:span><text:span text:style-name="T19">差一個常數倍，</text:span><text:span text:style-name="T20">Big-O </text:span><text:span text:style-name="T19">意義下相等：</text:span></text:p>
            <text:p text:style-name="P15" loext:marker-style-name="T47"><text:span text:style-name="T48">O(E log E) = O(E log V)</text:span><text:span text:style-name="T49">，兩種寫法都被接受。</text:span></text:p>
          </table:table-cell>
        </table:table-row>
      </table:table>
      <text:p text:style-name="P5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4" loext:marker-style-name="T69"><text:span text:style-name="T70">✅ </text:span><text:span text:style-name="T71">一句話記住 </text:span><text:span text:style-name="T70">Kruskal </text:span><text:span text:style-name="T71">複雜度</text:span></text:p>
            <text:p text:style-name="P7" loext:marker-style-name="T18"><text:span text:style-name="T20">Kruskal </text:span><text:span text:style-name="T19">的時間由「排序」決定，排 </text:span><text:span text:style-name="T20">E </text:span><text:span text:style-name="T19">條邊就花 </text:span><text:span text:style-name="T20">O(E log E)</text:span><text:span text:style-name="T19">，</text:span><text:span text:style-name="T20">Union-Find </text:span><text:span text:style-name="T19">幾乎免費。</text:span></text:p>
          </table:table-cell>
        </table:table-row>
      </table:table>
      <text:p text:style-name="P5"/>
      <text:p text:style-name="P7" loext:marker-style-name="T18"><text:soft-page-break/><draw:frame draw:style-name="fr2" draw:name="Complexity_Kruskal" text:anchor-type="as-char" svg:width="16cm" svg:height="12cm" draw:z-index="3"><draw:image xlink:href="Pictures/1000000000000550000003FCD632297D.png" xlink:type="simple" xlink:show="embed" xlink:actuate="onLoad" draw:mime-type="image/png"/></draw:frame></text:p>
      <text:p text:style-name="P19" loext:marker-style-name="T18"/>
      <text:h text:style-name="P8" text:outline-level="1" loext:marker-style-name="T21"><text:span text:style-name="T22">五、</text:span><text:span text:style-name="T21">Sollin</text:span><text:span text:style-name="T22">（</text:span><text:span text:style-name="T21">Borůvka</text:span><text:span text:style-name="T22">）演算法 ── 大家同時搶最便宜的邊</text:span></text:h>
      <text:p text:style-name="P5"/>
      <text:h text:style-name="P9" text:outline-level="2" loext:marker-style-name="T23"><text:span text:style-name="T23">5-1 </text:span><text:span text:style-name="T24">核心概念（超新手版解釋）</text:span></text:h>
      <text:p text:style-name="P5"/>
      <text:p text:style-name="P11" loext:marker-style-name="T30"><text:span text:style-name="T31">學 </text:span><text:span text:style-name="T32">Sollin </text:span><text:span text:style-name="T31">之前，先把一個關鍵詞徹底搞懂，後面就會非常順 ── 那個詞叫 </text:span><text:span text:style-name="T32">Component</text:span><text:span text:style-name="T31">（連通組）。很多人第一次看到「</text:span><text:span text:style-name="T32">Component</text:span><text:span text:style-name="T31">」整個腦袋打結，其實它超簡單。</text:span></text:p>
      <text:p text:style-name="P5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4" loext:marker-style-name="T99"><text:span text:style-name="T99">Component（連通組）＝ 目前「已經連在一起」的一坨節點。</text:span><text:span text:style-name="T99"/></text:p>
            <text:p text:style-name="P46" loext:marker-style-name="T99"/>
            <text:p text:style-name="P44" loext:marker-style-name="T99"><text:span text:style-name="T99">一開始還沒選任何邊，所以每個節點</text:span><text:span text:style-name="T99"/></text:p>
            <text:p text:style-name="P44" loext:marker-style-name="T99"><text:span text:style-name="T99">自己就是一個 Component：</text:span><text:span text:style-name="T99"/></text:p>
            <text:p text:style-name="P46" loext:marker-style-name="T99"/>
            <text:p text:style-name="P44" loext:marker-style-name="T99"><text:span text:style-name="T99"><text:s text:c="5"/>(A) <text:s text:c="3"/>(B) <text:s text:c="3"/>(C) <text:s text:c="3"/>(D) <text:s text:c="3"/>(E)</text:span><text:span text:style-name="T99"/></text:p>
            <text:p text:style-name="P46" loext:marker-style-name="T99"/>
            <text:p text:style-name="P44" loext:marker-style-name="T99"><text:span text:style-name="T99"><text:s text:c="2"/>→ 這時候有 5 個 Component（5 坨）</text:span><text:span text:style-name="T99"/></text:p>
          </table:table-cell>
        </table:table-row>
      </table:table>
      <text:p text:style-name="P5"/>
      <text:p text:style-name="P11" loext:marker-style-name="T30"><text:span text:style-name="T32">Sollin </text:span><text:span text:style-name="T31">的玩法，就像很多個小部落（每個 </text:span><text:span text:style-name="T32">Component </text:span><text:span text:style-name="T31">是一個部落）。每一輪，所有部落「同時」公告：「我要接通離我最近、最便宜的那個鄰居！」然後大家一起合併。</text:span></text:p>
      <text:p text:style-name="P5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6" loext:marker-style-name="T25"><text:span text:style-name="T26">Sollin </text:span><text:span text:style-name="T27">的靈魂：每跑一輪，</text:span><text:span text:style-name="T26">Component </text:span><text:span text:style-name="T27">數量就變少</text:span></text:p>
            <text:p text:style-name="P7" loext:marker-style-name="T18"><text:span text:style-name="T20">① </text:span><text:span text:style-name="T19">一開始：</text:span><text:span text:style-name="T20">5 </text:span><text:span text:style-name="T19">個 </text:span><text:span text:style-name="T20">Component</text:span><text:span text:style-name="T19">（每個點各自一坨）。</text:span></text:p>
            <text:p text:style-name="P7" loext:marker-style-name="T18"><text:span text:style-name="T20">② </text:span><text:span text:style-name="T19">跑完第一輪、大家合併後：可能只剩 </text:span><text:span text:style-name="T20">2 </text:span><text:span text:style-name="T19">坨。</text:span></text:p>
            <text:p text:style-name="P7" loext:marker-style-name="T18"><text:span text:style-name="T20">③ </text:span><text:span text:style-name="T19">再跑一輪：剩 </text:span><text:span text:style-name="T20">1 </text:span><text:span text:style-name="T19">坨。</text:span></text:p>
            <text:p text:style-name="P7" loext:marker-style-name="T18"><text:span text:style-name="T19">當只剩 </text:span><text:span text:style-name="T20">1 </text:span><text:span text:style-name="T19">個 </text:span><text:span text:style-name="T20">Component</text:span><text:span text:style-name="T19">（全部連在一起）→ </text:span><text:span text:style-name="T20">MST </text:span><text:span text:style-name="T19">完成！</text:span></text:p>
            <text:p text:style-name="P7" loext:marker-style-name="T18"><text:span text:style-name="T19">重點不是「一直 </text:span><text:span text:style-name="T20">merge merge merge</text:span><text:span text:style-name="T19">」，而是盯著 </text:span><text:span text:style-name="T20">Component </text:span><text:span text:style-name="T19">的數量一路往下掉：</text:span><text:span text:style-name="T20">5 → 2 → 1</text:span><text:span text:style-name="T19">。</text:span></text:p>
          </table:table-cell>
        </table:table-row>
      </table:table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6" loext:marker-style-name="T25"><text:span text:style-name="T26">Sollin </text:span><text:span text:style-name="T27">執行步驟（只有</text:span><text:span text:style-name="T26">4</text:span><text:span text:style-name="T27">步）：</text:span></text:p>
            <text:p text:style-name="P7" loext:marker-style-name="T18"><text:span text:style-name="T20">① </text:span><text:span text:style-name="T19">初始：每個節點自成一個 </text:span><text:span text:style-name="T20">Component</text:span><text:span text:style-name="T19">（一個小圓圈）。</text:span></text:p>
            <text:p text:style-name="P7" loext:marker-style-name="T18"><text:span text:style-name="T20">② </text:span><text:span text:style-name="T19">同一輪：每個 </text:span><text:span text:style-name="T20">Component </text:span><text:span text:style-name="T19">掃描自己能連出去的所有邊，找出「最便宜的外連邊」。</text:span></text:p>
            <text:p text:style-name="P7" loext:marker-style-name="T18"><text:span text:style-name="T20">③ </text:span><text:span text:style-name="T19">把所有被選中的邊一起加入 </text:span><text:span text:style-name="T20">MST</text:span><text:span text:style-name="T19">（若兩個 </text:span><text:span text:style-name="T20">Component </text:span><text:span text:style-name="T19">互選同一條邊，只算一次）。</text:span></text:p>
            <text:p text:style-name="P7" loext:marker-style-name="T18"><text:span text:style-name="T20">④ </text:span><text:span text:style-name="T19">合併後重新算 </text:span><text:span text:style-name="T20">Component</text:span><text:span text:style-name="T19">，重複步驟②③，直到只剩一個 </text:span><text:span text:style-name="T20">Component</text:span><text:span text:style-name="T19">。</text:span></text:p>
            <text:p text:style-name="P7" loext:marker-style-name="T18"><text:span text:style-name="T19">別名：</text:span><text:span text:style-name="T20">Sollin </text:span><text:span text:style-name="T19">和 </text:span><text:span text:style-name="T20">Borůvka </text:span><text:span text:style-name="T19">是同一個演算法，兩個名字都可能出現在考試！</text:span></text:p>
          </table:table-cell>
        </table:table-row>
      </table:table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Sollin</text:span><text:span text:style-name="T19">：每個 </text:span><text:span text:style-name="T20">Component </text:span><text:span text:style-name="T19">同時找自己最便宜的外連邊，全部一起合併。每跑一輪，</text:span><text:span text:style-name="T20">Component </text:span><text:span text:style-name="T19">數量至少減半。</text:span></text:p>
          </table:table-cell>
        </table:table-row>
      </table:table>
      <text:p text:style-name="P5"/>
      <text:h text:style-name="P9" text:outline-level="2" loext:marker-style-name="T23"><text:span text:style-name="T23">5-2 </text:span><text:span text:style-name="T24">完整圖解範例（盯著 </text:span><text:span text:style-name="T23">Component </text:span><text:span text:style-name="T24">數量一路變少）</text:span></text:h>
      <text:p text:style-name="P5"/>
      <text:p text:style-name="P11" loext:marker-style-name="T30"><text:span text:style-name="T31">我們用 </text:span><text:span text:style-name="T32">5 </text:span><text:span text:style-name="T31">個節點 </text:span><text:span text:style-name="T32">A, B, C, D, E </text:span><text:span text:style-name="T31">跑一次。請特別盯著一個數字：「現在還有幾個 </text:span><text:span text:style-name="T32">Component</text:span><text:span text:style-name="T31">」。</text:span></text:p>
      <text:p text:style-name="P11" loext:marker-style-name="T30"><text:span text:style-name="T31">各節點最短外連邊：</text:span><text:span text:style-name="T32">A→(A,D)=14</text:span><text:span text:style-name="T31">、</text:span><text:span text:style-name="T32">B→(B,C)=15</text:span><text:span text:style-name="T31">、</text:span><text:span text:style-name="T32">C→(C,D)=13</text:span><text:span text:style-name="T31">、</text:span><text:span text:style-name="T32">D→(D,E)=12</text:span><text:span text:style-name="T31">、</text:span><text:span text:style-name="T32">E→(D,E)=12</text:span><text:span text:style-name="T31">（</text:span><text:span text:style-name="T32">D </text:span><text:span text:style-name="T31">和 </text:span><text:span text:style-name="T32">E </text:span><text:span text:style-name="T31">都選同一條 </text:span><text:span text:style-name="T32">D─E</text:span><text:span text:style-name="T31">）。</text:span></text:p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44" loext:marker-style-name="T99"><text:span text:style-name="T99">第 0 步（開始）：每個點各自一坨</text:span><text:span text:style-name="T99"/></text:p>
            <text:p text:style-name="P46" loext:marker-style-name="T99"><text:soft-page-break/></text:p>
            <text:p text:style-name="P44" loext:marker-style-name="T99"><text:span text:style-name="T99"><text:s text:c="3"/>{A} <text:s text:c="2"/>{B} <text:s text:c="2"/>{C} <text:s text:c="2"/>{D} <text:s text:c="2"/>{E}</text:span><text:span text:style-name="T99"/></text:p>
            <text:p text:style-name="P46" loext:marker-style-name="T99"/>
            <text:p text:style-name="P44" loext:marker-style-name="T99"><text:span text:style-name="T99"><text:s text:c="2"/>→ 共 5 個 Component</text:span><text:span text:style-name="T99"/></text:p>
          </table:table-cell>
        </table:table-row>
      </table:table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4" loext:marker-style-name="T81"><text:span text:style-name="T83">Step 1</text:span><text:span text:style-name="T82">：第一輪 ── 每個 </text:span><text:span text:style-name="T83">Component </text:span><text:span text:style-name="T82">同時找自己最便宜的外連邊</text:span></text:p>
            <text:p text:style-name="P32" loext:marker-style-name="T99"><text:span text:style-name="T99">{A} 最便宜外連邊 = (A,D)=14 <text:s text:c="2"/>→ 提名 A─D</text:span><text:span text:style-name="T99"/></text:p>
            <text:p text:style-name="P32" loext:marker-style-name="T99"><text:span text:style-name="T99">{B} 最便宜外連邊 = (B,C)=15 <text:s text:c="2"/>→ 提名 B─C</text:span><text:span text:style-name="T99"/></text:p>
            <text:p text:style-name="P32" loext:marker-style-name="T99"><text:span text:style-name="T99">{C} 最便宜外連邊 = (C,D)=13 <text:s text:c="2"/>→ 提名 C─D</text:span><text:span text:style-name="T99"/></text:p>
            <text:p text:style-name="P32" loext:marker-style-name="T99"><text:span text:style-name="T99">{D} 最便宜外連邊 = (D,E)=12 <text:s text:c="2"/>→ 提名 D─E</text:span><text:span text:style-name="T99"/></text:p>
            <text:p text:style-name="P32" loext:marker-style-name="T99"><text:span text:style-name="T99">{E} 最便宜外連邊 = (D,E)=12 <text:s text:c="2"/>→ 提名 D─E（和 D 同一條，只算一次）</text:span><text:span text:style-name="T99"/></text:p>
            <text:p text:style-name="P47" loext:marker-style-name="T99"/>
            <text:p text:style-name="P32" loext:marker-style-name="T99"><text:span text:style-name="T99">本輪收下的邊：A─D=14, B─C=15, C─D=13, D─E=12</text:span><text:span text:style-name="T99"/></text:p>
          </table:table-cell>
        </table:table-row>
        <table:table-row table:style-name="表格57.1">
          <table:table-cell table:style-name="表格57.A2" office:value-type="string">
            <text:p text:style-name="P44" loext:marker-style-name="T99"><text:span text:style-name="T99">把上面提名的邊全部接上去，看 Component 怎麼併：</text:span><text:span text:style-name="T99"/></text:p>
            <text:p text:style-name="P46" loext:marker-style-name="T99"/>
            <text:p text:style-name="P44" loext:marker-style-name="T99"><text:span text:style-name="T99">合併前： {A} {B} {C} {D} {E} <text:s text:c="7"/>← 5 個</text:span><text:span text:style-name="T99"/></text:p>
            <text:p text:style-name="P44" loext:marker-style-name="T99"><text:span text:style-name="T99"><text:s text:c="3"/>A─D、D─E 把 A、D、E 串成一坨 → {A,D,E}</text:span><text:span text:style-name="T99"/></text:p>
            <text:p text:style-name="P44" loext:marker-style-name="T99"><text:span text:style-name="T99"><text:s text:c="3"/>C─D 把 C 接進來 → {A,C,D,E}</text:span><text:span text:style-name="T99"/></text:p>
            <text:p text:style-name="P44" loext:marker-style-name="T99"><text:span text:style-name="T99"><text:s text:c="3"/>B─C 把 B 接進來 → {A,B,C,D,E}</text:span><text:span text:style-name="T99"/></text:p>
            <text:p text:style-name="P44" loext:marker-style-name="T99"><text:span text:style-name="T99">合併後： {A,B,C,D,E} <text:s text:c="14"/>← 1 個</text:span><text:span text:style-name="T99"/></text:p>
            <text:p text:style-name="P46" loext:marker-style-name="T99"/>
            <text:p text:style-name="P44" loext:marker-style-name="T99"><text:span text:style-name="T99"><text:s text:c="2"/>→ Component 數量：5 → 1</text:span><text:span text:style-name="T99"/></text:p>
          </table:table-cell>
        </table:table-row>
        <table:table-row table:style-name="表格57.1">
          <table:table-cell table:style-name="表格57.A3" office:value-type="string">
            <text:p text:style-name="P24" loext:marker-style-name="T47"><text:span text:style-name="T48">✅ </text:span><text:span text:style-name="T49">一輪就連成一個 </text:span><text:span text:style-name="T48">Component</text:span><text:span text:style-name="T49">！</text:span></text:p>
            <text:p text:style-name="P16" loext:marker-style-name="T18"><text:span text:style-name="T20">MST </text:span><text:span text:style-name="T19">邊集合：</text:span><text:span text:style-name="T20">A─D=14, B─C=15, C─D=13, D─E=12</text:span></text:p>
            <text:p text:style-name="P16" loext:marker-style-name="T66"><text:span text:style-name="T67">總權重：</text:span><text:span text:style-name="T68">14 + 15 + 13 + 12 = 54</text:span></text:p>
            <text:p text:style-name="P40" loext:marker-style-name="T18"><text:span text:style-name="T19">邊數驗證：</text:span><text:span text:style-name="T20">V-1 = 5-1 = 4 </text:span><text:span text:style-name="T19">條 ✅</text:span></text:p>
          </table:table-cell>
        </table:table-row>
      </table:table>
      <text:p text:style-name="P5"/>
      <text:p text:style-name="P11" loext:marker-style-name="T30"><text:span text:style-name="T31">這個例子剛好一輪就結束了。但如果節點更多、邊更分散，常常要跑好幾輪 ── 下一節就用一個需要「兩輪」的例子，讓你親眼看到 </text:span><text:span text:style-name="T32">Component </text:span><text:span text:style-name="T31">從 </text:span><text:span text:style-name="T32">4 → 2 → 1 </text:span><text:span text:style-name="T31">慢慢減少。</text:span></text:p>
      <text:p text:style-name="P5"/>
      <text:h text:style-name="P9" text:outline-level="2"><text:span text:style-name="T23">5-3 </text:span><text:span text:style-name="T24">需要兩輪的範例</text:span></text:h>
      <text:p text:style-name="P5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44" loext:marker-style-name="T99"><text:span text:style-name="T99">範例圖：A─1─B，B─4─C，C─2─D，A─5─D</text:span><text:span text:style-name="T99"/></text:p>
            <text:p text:style-name="P44" loext:marker-style-name="T99"><text:span text:style-name="T99">初始 Component：{A} <text:s/>{B} <text:s/>{C} <text:s/>{D}</text:span><text:span text:style-name="T99"/></text:p>
            <text:p text:style-name="P44"/>
            <text:p text:style-name="P44" loext:marker-style-name="T99"><text:span text:style-name="T99">───── 第一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}：最短外連邊 = A─B=1 <text:s/>→ 提名 A─B</text:span><text:span text:style-name="T99"/></text:p>
            <text:p text:style-name="P44" loext:marker-style-name="T99"><text:span text:style-name="T99">{B}：最短外連邊 = A─B=1 <text:s/>→ 提名 A─B（同一條）</text:span><text:span text:style-name="T99"/></text:p>
            <text:p text:style-name="P44" loext:marker-style-name="T99"><text:span text:style-name="T99">{C}：最短外連邊 = C─D=2 <text:s/>→ 提名 C─D</text:span><text:span text:style-name="T99"/></text:p>
            <text:p text:style-name="P44" loext:marker-style-name="T99"><text:span text:style-name="T99">{D}：最短外連邊 = C─D=2 <text:s/>→ 提名 C─D（同一條）</text:span><text:span text:style-name="T99"/></text:p>
            <text:p text:style-name="P44" loext:marker-style-name="T99"><text:span text:style-name="T99">加入：A─B=1, C─D=2</text:span><text:span text:style-name="T99"/></text:p>
            <text:p text:style-name="P44" loext:marker-style-name="T99"><text:span text:style-name="T99">合併後 Component：{A,B} <text:s/>{C,D}</text:span><text:span text:style-name="T99"/></text:p>
            <text:p text:style-name="P44"/>
            <text:p text:style-name="P44" loext:marker-style-name="T99"><text:span text:style-name="T99">───── 第二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,B}：最短外連邊 = B─C=4 <text:s/>→ 提名 B─C</text:span><text:span text:style-name="T99"/></text:p>
            <text:p text:style-name="P44" loext:marker-style-name="T99"><text:span text:style-name="T99">{C,D}：最短外連邊 = B─C=4 <text:s/>→ 提名 B─C（同一條）</text:span><text:span text:style-name="T99"/></text:p>
            <text:p text:style-name="P44" loext:marker-style-name="T99"><text:span text:style-name="T99">加入：B─C=4</text:span><text:span text:style-name="T99"/></text:p>
            <text:p text:style-name="P44" loext:marker-style-name="T99"><text:span text:style-name="T99">合併後 Component：{A,B,C,D} <text:s/>← 只剩一個！完成！</text:span><text:span text:style-name="T99"/></text:p>
            <text:p text:style-name="P44"/>
            <text:p text:style-name="P44" loext:marker-style-name="T99"><text:span text:style-name="T99">MST = A─B=1, C─D=2, B─C=4 <text:s text:c="4"/>總重 = 7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5-4 Sollin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oft-page-break/><text:span text:style-name="T32">Sollin </text:span><text:span text:style-name="T31">的虛擬碼，比 </text:span><text:span text:style-name="T32">Prim</text:span><text:span text:style-name="T31">、</text:span><text:span text:style-name="T32">Kruskal </text:span><text:span text:style-name="T31">多包了一層「一輪一輪」的外圈：每一輪，所有 </text:span><text:span text:style-name="T32">Component </text:span><text:span text:style-name="T31">同時挑自己最便宜的外連邊，然後一起合併。</text:span><text:span text:style-name="T32">FIND / UNION </text:span><text:span text:style-name="T31">直接沿用上一章 </text:span><text:span text:style-name="T32">Kruskal </text:span><text:span text:style-name="T31">的 </text:span><text:span text:style-name="T32">Union-Find</text:span><text:span text:style-name="T31">。</text:span></text:p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42" loext:marker-style-name="T172"><text:span text:style-name="T172">// Sollin</text:span><text:span text:style-name="T173">（</text:span><text:span text:style-name="T172">Borůvka</text:span><text:span text:style-name="T173">）主演算法</text:span></text:p>
            <text:p text:style-name="P42" loext:marker-style-name="T169"><text:span text:style-name="T169">SOLLIN(V, E):</text:span><text:span text:style-name="T169"/></text:p>
            <text:p text:style-name="P42" loext:marker-style-name="T169"><text:span text:style-name="T169"><text:s text:c="4"/>for each </text:span><text:span text:style-name="T171">節點 </text:span><text:span text:style-name="T169">v in V:</text:span></text:p>
            <text:p text:style-name="P42" loext:marker-style-name="T169"><text:span text:style-name="T169"><text:s text:c="8"/>MAKE-SET(v) <text:s text:c="17"/>// </text:span><text:span text:style-name="T171">每個點 </text:span><text:span text:style-name="T169">= </text:span><text:span text:style-name="T171">一個 </text:span><text:span text:style-name="T169">Component</text:span></text:p>
            <text:p text:style-name="P42" loext:marker-style-name="T169"><text:span text:style-name="T169"><text:s text:c="4"/>MST <text:s text:c="2"/>← { }</text:span><text:span text:style-name="T169"/></text:p>
            <text:p text:style-name="P42" loext:marker-style-name="T169"><text:span text:style-name="T169"><text:s text:c="4"/>total ← 0</text:span><text:span text:style-name="T169"/></text:p>
            <text:p text:style-name="P45" loext:marker-style-name="T169"/>
            <text:p text:style-name="P42" loext:marker-style-name="T169"><text:span text:style-name="T169"><text:s text:c="4"/>while Component </text:span><text:span text:style-name="T171">數量 </text:span><text:span text:style-name="T169">&gt; 1: <text:s text:c="8"/>// </text:span><text:span text:style-name="T171">還沒併成一坨就繼續</text:span></text:p>
            <text:p text:style-name="P42" loext:marker-style-name="T169"><text:span text:style-name="T169"><text:s text:c="8"/>cheapest[</text:span><text:span text:style-name="T171">每個 </text:span><text:span text:style-name="T169">Component] ← </text:span><text:span text:style-name="T171">無 <text:s/></text:span><text:span text:style-name="T169">// </text:span><text:span text:style-name="T171">本輪各坨的最便宜外連邊</text:span></text:p>
            <text:p text:style-name="P45" loext:marker-style-name="T169"/>
            <text:p text:style-name="P42" loext:marker-style-name="T169"><text:span text:style-name="T169"><text:s text:c="8"/>// ① </text:span><text:span text:style-name="T171">所有 </text:span><text:span text:style-name="T169">Component </text:span><text:span text:style-name="T171">同時找最便宜外連邊</text:span></text:p>
            <text:p text:style-name="P42" loext:marker-style-name="T169"><text:span text:style-name="T169"><text:s text:c="8"/>for each </text:span><text:span text:style-name="T171">邊 </text:span><text:span text:style-name="T169">(u, v, w) in E:</text:span></text:p>
            <text:p text:style-name="P42" loext:marker-style-name="T169"><text:span text:style-name="T169"><text:s text:c="12"/>cu ← FIND(u); <text:s/>cv ← FIND(v)</text:span><text:span text:style-name="T169"/></text:p>
            <text:p text:style-name="P42" loext:marker-style-name="T169"><text:span text:style-name="T169"><text:s text:c="12"/>if cu = cv: continue <text:s text:c="5"/>// </text:span><text:span text:style-name="T171">同一坨，不是外連邊</text:span></text:p>
            <text:p text:style-name="P42" loext:marker-style-name="T169"><text:span text:style-name="T169"><text:s text:c="12"/>if w &lt; cheapest[cu].w: cheapest[cu] ← (u, v, w)</text:span><text:span text:style-name="T169"/></text:p>
            <text:p text:style-name="P42" loext:marker-style-name="T169"><text:span text:style-name="T169"><text:s text:c="12"/>if w &lt; cheapest[cv].w: cheapest[cv] ← (u, v, w)</text:span><text:span text:style-name="T169"/></text:p>
            <text:p text:style-name="P45" loext:marker-style-name="T169"/>
            <text:p text:style-name="P42" loext:marker-style-name="T169"><text:span text:style-name="T169"><text:s text:c="8"/>// ② </text:span><text:span text:style-name="T171">把每坨選到的邊一起收下、一起合併</text:span></text:p>
            <text:p text:style-name="P42" loext:marker-style-name="T169"><text:span text:style-name="T169"><text:s text:c="8"/>merged ← false</text:span><text:span text:style-name="T169"/></text:p>
            <text:p text:style-name="P42" loext:marker-style-name="T169"><text:span text:style-name="T169"><text:s text:c="8"/>for each Component c:</text:span><text:span text:style-name="T169"/></text:p>
            <text:p text:style-name="P42" loext:marker-style-name="T169"><text:span text:style-name="T169"><text:s text:c="12"/>if cheapest[c] </text:span><text:span text:style-name="T171">存在</text:span><text:span text:style-name="T169">:</text:span></text:p>
            <text:p text:style-name="P42" loext:marker-style-name="T169"><text:span text:style-name="T169"><text:s text:c="16"/>(u, v, w) ← cheapest[c]</text:span><text:span text:style-name="T169"/></text:p>
            <text:p text:style-name="P42" loext:marker-style-name="T169"><text:span text:style-name="T169"><text:s text:c="16"/>if FIND(u) ≠ FIND(v): // </text:span><text:span text:style-name="T171">避免同一條被兩坨重複收</text:span></text:p>
            <text:p text:style-name="P42" loext:marker-style-name="T169"><text:span text:style-name="T169"><text:s text:c="20"/></text:span><text:span text:style-name="T171">將 </text:span><text:span text:style-name="T169">(u, v) </text:span><text:span text:style-name="T171">加入 </text:span><text:span text:style-name="T169">MST</text:span></text:p>
            <text:p text:style-name="P42" loext:marker-style-name="T169"><text:span text:style-name="T169"><text:s text:c="20"/>total ← total + w</text:span><text:span text:style-name="T169"/></text:p>
            <text:p text:style-name="P42" loext:marker-style-name="T169"><text:span text:style-name="T169"><text:s text:c="20"/>UNION(u, v)</text:span><text:span text:style-name="T169"/></text:p>
            <text:p text:style-name="P42" loext:marker-style-name="T169"><text:span text:style-name="T169"><text:s text:c="20"/>merged ← true</text:span><text:span text:style-name="T169"/></text:p>
            <text:p text:style-name="P45" loext:marker-style-name="T169"/>
            <text:p text:style-name="P42" loext:marker-style-name="T169"><text:span text:style-name="T169"><text:s text:c="8"/>if merged = false: break <text:s text:c="5"/>// </text:span><text:span text:style-name="T171">圖不連通，提前結束</text:span></text:p>
            <text:p text:style-name="P45" loext:marker-style-name="T169"/>
            <text:p text:style-name="P42" loext:marker-style-name="T169"><text:span text:style-name="T169"><text:s text:c="4"/>return MST, total</text:span><text:span text:style-name="T169"/></text:p>
          </table:table-cell>
        </table:table-row>
      </table:table>
      <text:p text:style-name="P5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4" loext:marker-style-name="T54"><text:span text:style-name="T55">為什麼外圈最多只跑 </text:span><text:span text:style-name="T56">log V </text:span><text:span text:style-name="T55">輪？</text:span></text:p>
            <text:p text:style-name="P7" loext:marker-style-name="T18"><text:span text:style-name="T19">每一輪，每個 </text:span><text:span text:style-name="T20">Component </text:span><text:span text:style-name="T19">至少會和另一個 </text:span><text:span text:style-name="T20">Component </text:span><text:span text:style-name="T19">合併，所以 </text:span><text:span text:style-name="T20">Component </text:span><text:span text:style-name="T19">數量每輪至少砍一半：</text:span><text:span text:style-name="T20">V → V/2 → V/4 → … → 1</text:span><text:span text:style-name="T19">。</text:span></text:p>
            <text:p text:style-name="P7" loext:marker-style-name="T18"><text:span text:style-name="T19">砍一半最多砍 </text:span><text:span text:style-name="T20">log₂V </text:span><text:span text:style-name="T19">次，因此外圈最多跑 </text:span><text:span text:style-name="T20">log V </text:span><text:span text:style-name="T19">輪 ── 這正是 </text:span><text:span text:style-name="T20">Sollin </text:span><text:span text:style-name="T19">時間複雜度 </text:span><text:span text:style-name="T20">O(E log V) </text:span><text:span text:style-name="T19">的由來（下一節詳推）。</text:span></text:p>
          </table:table-cell>
        </table:table-row>
      </table:table>
      <text:p text:style-name="P5"/>
      <text:h text:style-name="P9" text:outline-level="2" loext:marker-style-name="T23"><text:span text:style-name="T23">5-5 </text:span><text:span text:style-name="T24">為什麼 </text:span><text:span text:style-name="T23">Sollin </text:span><text:span text:style-name="T24">適合分散式計算？</text:span></text:h>
      <text:p text:style-name="P5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44" loext:marker-style-name="T99"><text:span text:style-name="T99">Prim（必須一個中央節點主控）： <text:s text:c="3"/>Sollin（每台電腦各自計算）：</text:span><text:span text:style-name="T99"/></text:p>
            <text:p text:style-name="P44" loext:marker-style-name="T99"><text:span text:style-name="T99">中央節點 A <text:s text:c="24"/>電腦1 <text:s text:c="2"/>電腦2 <text:s text:c="2"/>電腦3 <text:s text:c="2"/>電腦4</text:span><text:span text:style-name="T99"/></text:p>
            <text:p text:style-name="P44" loext:marker-style-name="T99"><text:span text:style-name="T99"><text:s text:c="3"/>│ <text:s text:c="32"/>↓ <text:s text:c="6"/>↓ <text:s text:c="6"/>↓ <text:s text:c="6"/>↓</text:span><text:span text:style-name="T99"/></text:p>
            <text:p text:style-name="P44" loext:marker-style-name="T99"><text:span text:style-name="T99">一步步往外 <text:s text:c="23"/>各自找自己最短外連邊（同時進行！）</text:span><text:span text:style-name="T99"/></text:p>
            <text:p text:style-name="P44" loext:marker-style-name="T99"><text:span text:style-name="T99">只有一個節點在工作 <text:s text:c="18"/>↓ <text:s text:c="6"/>↓ <text:s text:c="6"/>↓ <text:s text:c="6"/>↓</text:span><text:span text:style-name="T99"/></text:p>
            <text:p text:style-name="P44" loext:marker-style-name="T99"><text:span text:style-name="T99">→ 無法平行化 <text:s text:c="22"/>統一回報 → 同時合併</text:span><text:span text:style-name="T99"/></text:p>
            <text:p text:style-name="P44"/>
            <text:p text:style-name="P44" loext:marker-style-name="T99"><text:span text:style-name="T99">Sollin 每輪所有 Component 同時計算，不需要一個中央控制點，</text:span><text:span text:style-name="T99"/></text:p>
            <text:p text:style-name="P44" loext:marker-style-name="T99"><text:span text:style-name="T99">因此特別適合 Google Maps 路網計算、超大規模網路拓樸分析。</text:span><text:span text:style-name="T99"/></text:p>
          </table:table-cell>
        </table:table-row>
      </table:table>
      <text:p text:style-name="P5"/>
      <text:p text:style-name="Standard"/>
      <text:h text:style-name="P9" text:outline-level="2" loext:marker-style-name="T23"><text:soft-page-break/><text:span text:style-name="T23">5-6 Sollin </text:span><text:span text:style-name="T24">時間複雜度 ── 逐步推導</text:span></text:h>
      <text:p text:style-name="P5"/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6" loext:marker-style-name="T25"><text:span text:style-name="T27">結論：</text:span><text:span text:style-name="T26">Sollin </text:span><text:span text:style-name="T27">時間複雜度 </text:span><text:span text:style-name="T26">= O(E log V)</text:span></text:p>
            <text:p text:style-name="P7" loext:marker-style-name="T18"><text:span text:style-name="T19">核心關鍵：每一輪把 </text:span><text:span text:style-name="T20">Component </text:span><text:span text:style-name="T19">數量至少減半，所以最多只跑 </text:span><text:span text:style-name="T20">log V </text:span><text:span text:style-name="T19">輪。</text:span></text:p>
          </table:table-cell>
        </table:table-row>
      </table:table>
      <text:p text:style-name="P5"/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6" loext:marker-style-name="T15"><text:span text:style-name="T17">【關鍵觀察一】每輪 </text:span><text:span text:style-name="T16">Component </text:span><text:span text:style-name="T17">數量至少減半</text:span></text:p>
            <text:p text:style-name="P19" loext:marker-style-name="T18"/>
            <text:p text:style-name="P7" loext:marker-style-name="T18"><text:span text:style-name="T19">初始：</text:span><text:span text:style-name="T20">V </text:span><text:span text:style-name="T19">個 </text:span><text:span text:style-name="T20">Component</text:span><text:span text:style-name="T19">（每個節點自成一組）。</text:span></text:p>
            <text:p text:style-name="P7" loext:marker-style-name="T18"><text:span text:style-name="T19">每個 </text:span><text:span text:style-name="T20">Component </text:span><text:span text:style-name="T19">都找一條最短外連邊，並與另一個 </text:span><text:span text:style-name="T20">Component </text:span><text:span text:style-name="T19">合併。</text:span></text:p>
            <text:p text:style-name="P19" loext:marker-style-name="T18"/>
            <text:p text:style-name="P6" loext:marker-style-name="T81"><text:span text:style-name="T82">最壞情況：每次剛好兩兩配對合併：</text:span><text:span text:style-name="T81"/></text:p>
            <text:p text:style-name="P7" loext:marker-style-name="T18"><text:span text:style-name="T19">輪次 </text:span><text:span text:style-name="T20">0</text:span><text:span text:style-name="T19">：</text:span><text:span text:style-name="T20">V </text:span><text:span text:style-name="T19">個 </text:span><text:span text:style-name="T20">Component</text:span><text:span text:style-name="T19">（例如 </text:span><text:span text:style-name="T20">V = 8</text:span><text:span text:style-name="T19">）</text:span></text:p>
            <text:p text:style-name="P7" loext:marker-style-name="T18"><text:span text:style-name="T19">輪次 </text:span><text:span text:style-name="T20">1</text:span><text:span text:style-name="T19">：最多剩 </text:span><text:span text:style-name="T20">V/2 </text:span><text:span text:style-name="T19">個（例如 </text:span><text:span text:style-name="T20">4 </text:span><text:span text:style-name="T19">個）</text:span></text:p>
            <text:p text:style-name="P7" loext:marker-style-name="T18"><text:span text:style-name="T19">輪次 </text:span><text:span text:style-name="T20">2</text:span><text:span text:style-name="T19">：最多剩 </text:span><text:span text:style-name="T20">V/4 </text:span><text:span text:style-name="T19">個（例如 </text:span><text:span text:style-name="T20">2 </text:span><text:span text:style-name="T19">個）</text:span></text:p>
            <text:p text:style-name="P15" loext:marker-style-name="T47"><text:span text:style-name="T49">輪次 </text:span><text:span text:style-name="T48">3</text:span><text:span text:style-name="T49">：最多剩 </text:span><text:span text:style-name="T48">V/8 </text:span><text:span text:style-name="T49">個（例如 </text:span><text:span text:style-name="T48">1 </text:span><text:span text:style-name="T49">個）← 完成！</text:span></text:p>
            <text:p text:style-name="P19" loext:marker-style-name="T18"/>
            <text:p text:style-name="P38" loext:marker-style-name="T54"><text:span text:style-name="T56">→ </text:span><text:span text:style-name="T55">最多只需要 ⌈</text:span><text:span text:style-name="T56">log₂ V⌉ </text:span><text:span text:style-name="T55">輪就能全部合併完。</text:span></text:p>
          </table:table-cell>
        </table:table-row>
      </table:table>
      <text:p text:style-name="P5"/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row table:style-name="表格64.1">
          <table:table-cell table:style-name="表格64.A1" office:value-type="string">
            <text:p text:style-name="P5" loext:marker-style-name="T177"><text:span text:style-name="T178">輪次</text:span><text:span text:style-name="T177"/></text:p>
          </table:table-cell>
          <table:table-cell table:style-name="表格64.A1" office:value-type="string">
            <text:p text:style-name="P5" loext:marker-style-name="T177"><text:span text:style-name="T244">Component </text:span><text:span text:style-name="T178">數量（上界）</text:span></text:p>
          </table:table-cell>
          <table:table-cell table:style-name="表格64.A1" office:value-type="string">
            <text:p text:style-name="P5" loext:marker-style-name="T177"><text:span text:style-name="T178">本輪操作</text:span><text:span text:style-name="T177"/></text:p>
          </table:table-cell>
          <table:table-cell table:style-name="表格64.A1" office:value-type="string">
            <text:p text:style-name="P5" loext:marker-style-name="T177"><text:span text:style-name="T178">本輪花費</text:span><text:span text:style-name="T177"/></text:p>
          </table:table-cell>
        </table:table-row>
        <table:table-row table:style-name="表格64.1">
          <table:table-cell table:style-name="表格64.A2" office:value-type="string">
            <text:p text:style-name="P7" loext:marker-style-name="T18"><text:span text:style-name="T19">第 </text:span><text:span text:style-name="T20">1 </text:span><text:span text:style-name="T19">輪</text:span></text:p>
          </table:table-cell>
          <table:table-cell table:style-name="表格64.A2" office:value-type="string">
            <text:p text:style-name="P7" loext:marker-style-name="T18"><text:span text:style-name="T20">V → ≤ V/2</text:span><text:span text:style-name="T18"/></text:p>
          </table:table-cell>
          <table:table-cell table:style-name="表格64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4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4.1">
          <table:table-cell table:style-name="表格64.A3" office:value-type="string">
            <text:p text:style-name="P7" loext:marker-style-name="T18"><text:span text:style-name="T19">第 </text:span><text:span text:style-name="T20">2 </text:span><text:span text:style-name="T19">輪</text:span></text:p>
          </table:table-cell>
          <table:table-cell table:style-name="表格64.A3" office:value-type="string">
            <text:p text:style-name="P7" loext:marker-style-name="T18"><text:span text:style-name="T20">≤ V/2 → ≤ V/4</text:span><text:span text:style-name="T18"/></text:p>
          </table:table-cell>
          <table:table-cell table:style-name="表格64.A3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4.A3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4.1">
          <table:table-cell table:style-name="表格64.A2" office:value-type="string">
            <text:p text:style-name="P7" loext:marker-style-name="T18"><text:span text:style-name="T19">第 </text:span><text:span text:style-name="T20">k </text:span><text:span text:style-name="T19">輪</text:span></text:p>
          </table:table-cell>
          <table:table-cell table:style-name="表格64.A2" office:value-type="string">
            <text:p text:style-name="P7" loext:marker-style-name="T18"><text:span text:style-name="T20">≤ V/2^(k-1)</text:span><text:span text:style-name="T18"/></text:p>
          </table:table-cell>
          <table:table-cell table:style-name="表格64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4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4.1">
          <table:table-cell table:style-name="表格64.A3" office:value-type="string">
            <text:p text:style-name="P7" loext:marker-style-name="T18"><text:span text:style-name="T19">共幾輪？</text:span><text:span text:style-name="T18"/></text:p>
          </table:table-cell>
          <table:table-cell table:style-name="表格64.A3" office:value-type="string">
            <text:p text:style-name="P7" loext:marker-style-name="T18"><text:span text:style-name="T19">最多 </text:span><text:span text:style-name="T20">log V </text:span><text:span text:style-name="T19">輪</text:span></text:p>
          </table:table-cell>
          <table:table-cell table:style-name="表格64.A3" office:value-type="string">
            <text:p text:style-name="P7" loext:marker-style-name="T18"><text:span text:style-name="T20">—</text:span><text:span text:style-name="T18"/></text:p>
          </table:table-cell>
          <table:table-cell table:style-name="表格64.A3" office:value-type="string">
            <text:p text:style-name="P7" loext:marker-style-name="T18"><text:span text:style-name="T20">—</text:span><text:span text:style-name="T18"/></text:p>
          </table:table-cell>
        </table:table-row>
        <table:table-row table:style-name="表格64.1">
          <table:table-cell table:style-name="表格64.A6" office:value-type="string">
            <text:p text:style-name="P14" loext:marker-style-name="T69"><text:span text:style-name="T71">總計</text:span><text:span text:style-name="T69"/></text:p>
          </table:table-cell>
          <table:table-cell table:style-name="表格64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4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4.A6" office:value-type="string">
            <text:p text:style-name="P14" loext:marker-style-name="T69"><text:span text:style-name="T70">log V </text:span><text:span text:style-name="T71">輪 </text:span><text:span text:style-name="T70">× O(E) = O(E log V)</text:span></text:p>
          </table:table-cell>
        </table:table-row>
      </table:table>
      <text:p text:style-name="P5"/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6" loext:marker-style-name="T15"><text:span text:style-name="T17">【關鍵觀察二】每一輪做什麼？花多少時間？</text:span><text:span text:style-name="T15"/></text:p>
            <text:p text:style-name="P19" loext:marker-style-name="T18"/>
            <text:p text:style-name="P7" loext:marker-style-name="T18"><text:span text:style-name="T19">每一輪，所有 </text:span><text:span text:style-name="T20">Component </text:span><text:span text:style-name="T19">同時找自己的最短外連邊，然後合併。</text:span></text:p>
            <text:p text:style-name="P19" loext:marker-style-name="T18"/>
            <text:p text:style-name="P6" loext:marker-style-name="T81"><text:span text:style-name="T82">一輪裡的操作：</text:span><text:span text:style-name="T81"/></text:p>
            <text:p text:style-name="P7" loext:marker-style-name="T18"><text:span text:style-name="T20">① </text:span><text:span text:style-name="T19">掃描所有 </text:span><text:span text:style-name="T20">E </text:span><text:span text:style-name="T19">條邊，替每個 </text:span><text:span text:style-name="T20">Component </text:span><text:span text:style-name="T19">找最短外連邊 → </text:span><text:span text:style-name="T20">O(E)</text:span></text:p>
            <text:p text:style-name="P7" loext:marker-style-name="T18"><text:span text:style-name="T20">② </text:span><text:span text:style-name="T19">把選出的邊加入 </text:span><text:span text:style-name="T20">MST</text:span><text:span text:style-name="T19">，合併 </text:span><text:span text:style-name="T20">Component</text:span><text:span text:style-name="T19">（</text:span><text:span text:style-name="T20">Union-Find</text:span><text:span text:style-name="T19">） → </text:span><text:span text:style-name="T20">O(V α(V)) ≈ O(V)</text:span></text:p>
            <text:p text:style-name="P7" loext:marker-style-name="T18"><text:span text:style-name="T20">③ </text:span><text:span text:style-name="T19">因為連通圖必有 </text:span><text:span text:style-name="T20">E ≥ V−1</text:span><text:span text:style-name="T19">，而通常 </text:span><text:span text:style-name="T20">E ≥ V</text:span><text:span text:style-name="T19">（鏈狀圖例外），</text:span><text:span text:style-name="T20">O(E) </text:span><text:span text:style-name="T19">主導 → 每輪花費 </text:span><text:span text:style-name="T20">O(E)</text:span></text:p>
            <text:p text:style-name="P19" loext:marker-style-name="T18"/>
            <text:p text:style-name="P15" loext:marker-style-name="T47"><text:span text:style-name="T48">→ </text:span><text:span text:style-name="T49">每輪 </text:span><text:span text:style-name="T48">O(E)</text:span><text:span text:style-name="T49">，共最多 </text:span><text:span text:style-name="T48">log V </text:span><text:span text:style-name="T49">輪 → 總計 </text:span><text:span text:style-name="T48">O(E log V)</text:span></text:p>
          </table:table-cell>
        </table:table-row>
      </table:table>
      <text:p text:style-name="P5"/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4" loext:marker-style-name="T54"><text:span text:style-name="T55">用數字感受一下（</text:span><text:span text:style-name="T56">V = 1024 </text:span><text:span text:style-name="T55">的圖）：</text:span></text:p>
            <text:p text:style-name="P19" loext:marker-style-name="T18"/>
            <text:p text:style-name="P7" loext:marker-style-name="T18"><text:span text:style-name="T19">初始： </text:span><text:span text:style-name="T20">1024 </text:span><text:span text:style-name="T19">個 </text:span><text:span text:style-name="T20">Component</text:span></text:p>
            <text:p text:style-name="P7" loext:marker-style-name="T18"><text:span text:style-name="T19">第 </text:span><text:span text:style-name="T20">1 </text:span><text:span text:style-name="T19">輪：最多 </text:span><text:span text:style-name="T20">512 </text:span><text:span text:style-name="T19">個</text:span></text:p>
            <text:p text:style-name="P7" loext:marker-style-name="T18"><text:span text:style-name="T19">第 </text:span><text:span text:style-name="T20">2 </text:span><text:span text:style-name="T19">輪：最多 </text:span><text:span text:style-name="T20">256 </text:span><text:span text:style-name="T19">個</text:span></text:p>
            <text:p text:style-name="P23" loext:marker-style-name="T61"><text:span text:style-name="T63">......</text:span><text:span text:style-name="T61"/></text:p>
            <text:p text:style-name="P15" loext:marker-style-name="T47"><text:soft-page-break/><text:span text:style-name="T49">第 </text:span><text:span text:style-name="T48">10 </text:span><text:span text:style-name="T49">輪：最多 </text:span><text:span text:style-name="T48">1 </text:span><text:span text:style-name="T49">個 → 完成！</text:span></text:p>
            <text:p text:style-name="P19" loext:marker-style-name="T18"/>
            <text:p text:style-name="P7" loext:marker-style-name="T18"><text:span text:style-name="T20">log₂(1024) = 10</text:span><text:span text:style-name="T19">，所以最多只需要 </text:span><text:span text:style-name="T20">10 </text:span><text:span text:style-name="T19">輪。</text:span></text:p>
            <text:p text:style-name="P38" loext:marker-style-name="T54"><text:span text:style-name="T55">每輪掃所有 </text:span><text:span text:style-name="T56">E </text:span><text:span text:style-name="T55">條邊 → 總計 </text:span><text:span text:style-name="T56">10 × E = O(E log V) </text:span><text:span text:style-name="T55">次操作。</text:span></text:p>
          </table:table-cell>
        </table:table-row>
      </table:table>
      <text:p text:style-name="P5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6" loext:marker-style-name="T15"><text:span text:style-name="T17">與 </text:span><text:span text:style-name="T16">Kruskal</text:span><text:span text:style-name="T17">、</text:span><text:span text:style-name="T16">Prim </text:span><text:span text:style-name="T17">的複雜度比較</text:span></text:p>
            <text:p text:style-name="P19" loext:marker-style-name="T18"/>
            <text:p text:style-name="P7" loext:marker-style-name="T18"><text:span text:style-name="T20">Sollin O(E log V) vs Kruskal O(E log E) = O(E log V) → </text:span><text:span text:style-name="T19">相同！</text:span></text:p>
            <text:p text:style-name="P7" loext:marker-style-name="T18"><text:span text:style-name="T20">Sollin O(E log V) vs Prim Heap </text:span><text:span text:style-name="T19">版 </text:span><text:span text:style-name="T20">O(E log V) → </text:span><text:span text:style-name="T19">相同！</text:span></text:p>
            <text:p text:style-name="P19" loext:marker-style-name="T18"/>
            <text:p text:style-name="P6" loext:marker-style-name="T81"><text:span text:style-name="T82">那 </text:span><text:span text:style-name="T83">Sollin </text:span><text:span text:style-name="T82">的優勢是什麼？</text:span></text:p>
            <text:p text:style-name="P7" loext:marker-style-name="T18"><text:span text:style-name="T19">每一輪的操作是「所有 </text:span><text:span text:style-name="T20">Component </text:span><text:span text:style-name="T19">同時進行」，天然適合平行化。</text:span></text:p>
            <text:p text:style-name="P7" loext:marker-style-name="T18"><text:span text:style-name="T20">Prim </text:span><text:span text:style-name="T19">和 </text:span><text:span text:style-name="T20">Kruskal </text:span><text:span text:style-name="T19">是序列演算法（一步一步），難以平行化。</text:span></text:p>
            <text:p text:style-name="P15" loext:marker-style-name="T47"><text:span text:style-name="T48">→ </text:span><text:span text:style-name="T49">分散式環境下，</text:span><text:span text:style-name="T48">Sollin </text:span><text:span text:style-name="T49">每輪可分給多台電腦同時跑，</text:span></text:p>
            <text:p text:style-name="P15" loext:marker-style-name="T47"><text:span text:style-name="T49">大幅降低實際牆鐘時間（</text:span><text:span text:style-name="T48">Wall-clock time</text:span><text:span text:style-name="T49">）。</text:span></text:p>
          </table:table-cell>
        </table:table-row>
      </table:table>
      <text:p text:style-name="P5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4" loext:marker-style-name="T69"><text:span text:style-name="T70">✅ </text:span><text:span text:style-name="T71">一句話記住 </text:span><text:span text:style-name="T70">Sollin </text:span><text:span text:style-name="T71">複雜度</text:span></text:p>
            <text:p text:style-name="P7" loext:marker-style-name="T18"><text:span text:style-name="T19">每輪掃全部 </text:span><text:span text:style-name="T20">E </text:span><text:span text:style-name="T19">條邊 </text:span><text:span text:style-name="T20">O(E)</text:span><text:span text:style-name="T19">，最多跑 </text:span><text:span text:style-name="T20">log V </text:span><text:span text:style-name="T19">輪（每輪 </text:span><text:span text:style-name="T20">Component </text:span><text:span text:style-name="T19">至少減半）→ </text:span><text:span text:style-name="T20">O(E log V)</text:span><text:span text:style-name="T19">。</text:span></text:p>
          </table:table-cell>
        </table:table-row>
      </table:table>
      <text:p text:style-name="P5"/>
      <text:p text:style-name="P7" loext:marker-style-name="T18"><draw:frame draw:style-name="fr2" draw:name="Complexity_Sollin" text:anchor-type="as-char" svg:width="16cm" svg:height="11.529cm" draw:z-index="4"><draw:image xlink:href="Pictures/1000000000000550000003D4BE568724.png" xlink:type="simple" xlink:show="embed" xlink:actuate="onLoad" draw:mime-type="image/png"/></draw:frame></text:p>
      <text:p text:style-name="P19" loext:marker-style-name="T18"/>
      <text:h text:style-name="P8" text:outline-level="1" loext:marker-style-name="T21"><text:span text:style-name="T22">六、</text:span><text:span text:style-name="T21">113</text:span><text:span text:style-name="T22">閩 </text:span><text:span text:style-name="T21">Q5 ── Kruskal </text:span><text:span text:style-name="T22">公職真題完整解題</text:span></text:h>
      <text:p text:style-name="P5"/>
      <text:h text:style-name="P9" text:outline-level="2" loext:marker-style-name="T23"><text:span text:style-name="T23">6-1 </text:span><text:span text:style-name="T24">題目</text:span></text:h>
      <text:p text:style-name="P5"/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4" loext:marker-style-name="T245"><text:span text:style-name="T245">題目：</text:span><text:span text:style-name="T245"/></text:p>
            <text:p text:style-name="P44" loext:marker-style-name="T245"><text:span text:style-name="T245">圖 G 有 7 個節點：a, b, c, d, e, f, g</text:span><text:span text:style-name="T245"/></text:p>
            <text:p text:style-name="P44" loext:marker-style-name="T245"><text:span text:style-name="T245">所有邊（格式：節點─節點 = 權重）：</text:span><text:span text:style-name="T245"/></text:p>
            <text:p text:style-name="P44" loext:marker-style-name="T245"><text:span text:style-name="T245">a─b=13　　a─c=9　　a─d=10　　b─d=16　　c─d=12</text:span><text:span text:style-name="T245"/></text:p>
            <text:p text:style-name="P44" loext:marker-style-name="T245"><text:span text:style-name="T245">c─e=2　　　c─f=3　　　d─g=18　　　e─f=4　　　f─g=6</text:span><text:span text:style-name="T245"/></text:p>
            <text:p text:style-name="P44"/>
            <text:p text:style-name="P44" loext:marker-style-name="T245"><text:span text:style-name="T245">請用 Kruskal 演算法找出 MST 及總權重。</text:span><text:span text:style-name="T245"/></text:p>
          </table:table-cell>
        </table:table-row>
      </table:table>
      <text:p text:style-name="P5"/>
      <text:h text:style-name="P9" text:outline-level="2" loext:marker-style-name="T23"><text:span text:style-name="T23">6-2 </text:span><text:span text:style-name="T24">先畫出圖的結構</text:span></text:h>
      <text:p text:style-name="P5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4" loext:marker-style-name="T99"><text:span text:style-name="T99">圖的連線示意（看懂這張圖，解題就簡單了）：</text:span><text:span text:style-name="T99"/></text:p>
            <text:p text:style-name="P44" loext:marker-style-name="T99"><text:span text:style-name="T99"><text:s text:c="13"/>b</text:span><text:span text:style-name="T99"/></text:p>
            <text:p text:style-name="P44" loext:marker-style-name="T99"><text:span text:style-name="T99"><text:s text:c="12"/>/ \</text:span><text:span text:style-name="T99"/></text:p>
            <text:p text:style-name="P44" loext:marker-style-name="T99"><text:span text:style-name="T99"><text:s text:c="10"/>13 <text:s text:c="2"/>16</text:span><text:span text:style-name="T99"/></text:p>
            <text:p text:style-name="P44" loext:marker-style-name="T99"><text:span text:style-name="T99"><text:s text:c="10"/>/ <text:s text:c="4"/>\</text:span><text:span text:style-name="T99"/></text:p>
            <text:p text:style-name="P44" loext:marker-style-name="T99"><text:span text:style-name="T99"><text:s text:c="9"/>a──10───d──18──g</text:span><text:span text:style-name="T99"/></text:p>
            <text:p text:style-name="P44" loext:marker-style-name="T99"><text:span text:style-name="T99"><text:s text:c="10"/>\ <text:s text:c="5"/>│ <text:s text:c="6"/>\</text:span><text:span text:style-name="T99"/></text:p>
            <text:p text:style-name="P44" loext:marker-style-name="T99"><text:span text:style-name="T99"><text:s text:c="11"/>9 <text:s text:c="3"/>12 <text:s text:c="7"/>6</text:span><text:span text:style-name="T99"/></text:p>
            <text:p text:style-name="P44" loext:marker-style-name="T99"><text:span text:style-name="T99"><text:s text:c="12"/>\ <text:s text:c="3"/>│ <text:s text:c="8"/>\</text:span><text:span text:style-name="T99"/></text:p>
            <text:p text:style-name="P44" loext:marker-style-name="T99"><text:span text:style-name="T99"><text:s text:c="13"/>c──3──f────6───+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2 <text:s text:c="5"/>4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e──────+</text:span><text:span text:style-name="T99"/></text:p>
            <text:p text:style-name="P44"/>
            <text:p text:style-name="P44" loext:marker-style-name="T99"><text:span text:style-name="T99">(c─e=2, e─f=4, c─f=3)</text:span><text:span text:style-name="T99"/></text:p>
            <text:p text:style-name="P44" loext:marker-style-name="T99"><text:span text:style-name="T99">注意：c 連著好幾條邊！c─e=2, c─f=3, c─d=12, a─c=9</text:span><text:span text:style-name="T99"/></text:p>
            <text:p text:style-name="P44" loext:marker-style-name="T99"><text:span text:style-name="T99"><text:s text:c="6"/>這些是解題時最容易混淆的地方，要特別注意。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6-3 Step 1</text:span><text:span text:style-name="T24">：所有邊排序</text:span></text:h>
      <text:p text:style-name="P5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4" loext:marker-style-name="T99"><text:span text:style-name="T99">10條邊，依權重由小到大排序：</text:span><text:span text:style-name="T99"/></text:p>
            <text:p text:style-name="P44"/>
            <text:p text:style-name="P44" loext:marker-style-name="T99"><text:span text:style-name="T99">排序 <text:s/>邊 <text:s text:c="10"/>權重 <text:s text:c="3"/>說明</text:span><text:span text:style-name="T99"/></text:p>
            <text:p text:style-name="P44" loext:marker-style-name="T99"><text:span text:style-name="T99">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<text:s text:c="2"/>1 <text:s text:c="2"/>(c, e) <text:s text:c="8"/>2 <text:s text:c="3"/>← c 和 e 直接連，最便宜</text:span><text:span text:style-name="T99"/></text:p>
            <text:p text:style-name="P44" loext:marker-style-name="T99"><text:span text:style-name="T99"><text:s text:c="2"/>2 <text:s text:c="2"/>(c, f) <text:s text:c="8"/>3 <text:s text:c="3"/>← c 和 f 直接連</text:span><text:span text:style-name="T99"/></text:p>
            <text:p text:style-name="P44" loext:marker-style-name="T99"><text:span text:style-name="T99"><text:s text:c="2"/>3 <text:s text:c="2"/>(e, f) <text:s text:c="8"/>4 <text:s text:c="3"/>← e 和 f 直接連</text:span><text:span text:style-name="T99"/></text:p>
            <text:p text:style-name="P44" loext:marker-style-name="T99"><text:span text:style-name="T99"><text:s text:c="2"/>4 <text:s text:c="2"/>(f, g) <text:s text:c="8"/>6 <text:s text:c="3"/>← f 和 g 直接連</text:span><text:span text:style-name="T99"/></text:p>
            <text:p text:style-name="P44" loext:marker-style-name="T99"><text:span text:style-name="T99"><text:s text:c="2"/>5 <text:s text:c="2"/>(a, c) <text:s text:c="8"/>9 <text:s text:c="3"/>← a 和 c 直接連</text:span><text:span text:style-name="T99"/></text:p>
            <text:p text:style-name="P44" loext:marker-style-name="T99"><text:span text:style-name="T99"><text:s text:c="2"/>6 <text:s text:c="2"/>(a, d) <text:s text:c="7"/>10 <text:s text:c="3"/>← a 和 d 直接連</text:span><text:span text:style-name="T99"/></text:p>
            <text:p text:style-name="P44" loext:marker-style-name="T99"><text:span text:style-name="T99"><text:s text:c="2"/>7 <text:s text:c="2"/>(c, d) <text:s text:c="7"/>12 <text:s text:c="3"/>← c 和 d 直接連</text:span><text:span text:style-name="T99"/></text:p>
            <text:p text:style-name="P44" loext:marker-style-name="T99"><text:span text:style-name="T99"><text:s text:c="2"/>8 <text:s text:c="2"/>(a, b) <text:s text:c="7"/>13 <text:s text:c="3"/>← a 和 b 直接連</text:span><text:span text:style-name="T99"/></text:p>
            <text:p text:style-name="P44" loext:marker-style-name="T99"><text:span text:style-name="T99"><text:s text:c="2"/>9 <text:s text:c="2"/>(b, d) <text:s text:c="7"/>16</text:span><text:span text:style-name="T99"/></text:p>
            <text:p text:style-name="P44" loext:marker-style-name="T99"><text:span text:style-name="T99"><text:s/>10 <text:s text:c="2"/>(d, g) <text:s text:c="7"/>18 <text:s text:c="3"/>← 最貴</text:span><text:span text:style-name="T99"/></text:p>
          </table:table-cell>
        </table:table-row>
      </table:table>
      <text:p text:style-name="P5"/>
      <text:h text:style-name="P9" text:outline-level="2"><text:soft-page-break/><text:span text:style-name="T23">6-4 Step 2</text:span><text:span text:style-name="T24">：逐條執行 </text:span><text:span text:style-name="T23">Kruskal</text:span></text:h>
      <text:p text:style-name="P5"/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4" loext:marker-style-name="T81"><text:span text:style-name="T83">Step 1</text:span><text:span text:style-name="T82">：加入 </text:span><text:span text:style-name="T83">(c,e)=2</text:span></text:p>
            <text:p text:style-name="P32" loext:marker-style-name="T99"><text:span text:style-name="T99">Find(c)=c <text:s text:c="3"/>Find(e)=e <text:s text:c="3"/>← 不同集合，可以加！</text:span><text:span text:style-name="T99"/></text:p>
            <text:p text:style-name="P32" loext:marker-style-name="T99"><text:span text:style-name="T99">Union(c, e)</text:span><text:span text:style-name="T99"/></text:p>
            <text:p text:style-name="P32" loext:marker-style-name="T99"><text:span text:style-name="T99">集合狀態：{a} {b} {c,e} {d} {f} {g}</text:span><text:span text:style-name="T99"/></text:p>
            <text:p text:style-name="P32" loext:marker-style-name="T99"><text:span text:style-name="T99">已選邊（1條）：(c,e)=2</text:span><text:span text:style-name="T99"/></text:p>
            <text:p text:style-name="P32" loext:marker-style-name="T99"><text:span text:style-name="T99">目前 MST： <text:s/>c──2──e</text:span><text:span text:style-name="T99"/></text:p>
          </table:table-cell>
        </table:table-row>
      </table:table>
      <text:p text:style-name="P5"/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24" loext:marker-style-name="T81"><text:span text:style-name="T83">Step 2</text:span><text:span text:style-name="T82">：加入 </text:span><text:span text:style-name="T83">(c,f)=3</text:span></text:p>
            <text:p text:style-name="P32" loext:marker-style-name="T99"><text:span text:style-name="T99">Find(c)=c <text:s text:c="3"/>Find(f)=f <text:s text:c="3"/>← 不同集合，可以加！</text:span><text:span text:style-name="T99"/></text:p>
            <text:p text:style-name="P32" loext:marker-style-name="T99"><text:span text:style-name="T99">Union(c, f)</text:span><text:span text:style-name="T99"/></text:p>
            <text:p text:style-name="P32" loext:marker-style-name="T99"><text:span text:style-name="T99">集合狀態：{a} {b} {c,e,f} {d} {g}</text:span><text:span text:style-name="T99"/></text:p>
            <text:p text:style-name="P32" loext:marker-style-name="T99"><text:span text:style-name="T99">已選邊（2條）：(c,e)=2, (c,f)=3</text:span><text:span text:style-name="T99"/></text:p>
            <text:p text:style-name="P32" loext:marker-style-name="T99"><text:span text:style-name="T99">目前 MST： <text:s/>e──2──c──3──f</text:span><text:span text:style-name="T99"/></text:p>
          </table:table-cell>
        </table:table-row>
      </table:table>
      <text:p text:style-name="P5"/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24" loext:marker-style-name="T40"><text:span text:style-name="T41">Step 3</text:span><text:span text:style-name="T42">：看 </text:span><text:span text:style-name="T41">(e,f)=4 → ⛔ </text:span><text:span text:style-name="T42">跳過！</text:span></text:p>
            <text:p text:style-name="P32" loext:marker-style-name="T99"><text:span text:style-name="T99">Find(e)=c <text:s text:c="3"/>Find(f)=c <text:s text:c="3"/>← 相同集合！</text:span><text:span text:style-name="T99"/></text:p>
            <text:p text:style-name="P32" loext:marker-style-name="T99"><text:span text:style-name="T99">為什麼會同集合？</text:span><text:span text:style-name="T99"/></text:p>
            <text:p text:style-name="P32" loext:marker-style-name="T99"><text:span text:style-name="T99"><text:s text:c="2"/>上面把 c,e 合併成一組，又把 c,f 合併進來，</text:span><text:span text:style-name="T99"/></text:p>
            <text:p text:style-name="P32" loext:marker-style-name="T99"><text:span text:style-name="T99"><text:s text:c="2"/>所以 e、c、f 都在同一組了。</text:span><text:span text:style-name="T99"/></text:p>
            <text:p text:style-name="P32" loext:marker-style-name="T99"><text:span text:style-name="T99">若加入 e─f：</text:span><text:span text:style-name="T99"/></text:p>
            <text:p text:style-name="P32" loext:marker-style-name="T99"><text:span text:style-name="T99"><text:s text:c="2"/>e──2──c──3──f</text:span><text:span text:style-name="T99"/></text:p>
            <text:p text:style-name="P32" loext:marker-style-name="T99"><text:span text:style-name="T99"><text:s text:c="2"/>└───────4───┘ <text:s/>← 形成三角形迴路！</text:span><text:span text:style-name="T99"/></text:p>
            <text:p text:style-name="P32" loext:marker-style-name="T99"><text:span text:style-name="T99">⛔ 跳過 (e,f)=4</text:span><text:span text:style-name="T99"/></text:p>
          </table:table-cell>
        </table:table-row>
      </table:table>
      <text:p text:style-name="P5"/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24" loext:marker-style-name="T81"><text:span text:style-name="T83">Step 4</text:span><text:span text:style-name="T82">：加入 </text:span><text:span text:style-name="T83">(f,g)=6</text:span></text:p>
            <text:p text:style-name="P32" loext:marker-style-name="T99"><text:span text:style-name="T99">Find(f)=c <text:s text:c="3"/>Find(g)=g <text:s text:c="3"/>← 不同集合，可以加！</text:span><text:span text:style-name="T99"/></text:p>
            <text:p text:style-name="P32" loext:marker-style-name="T99"><text:span text:style-name="T99">Union(f, g)</text:span><text:span text:style-name="T99"/></text:p>
            <text:p text:style-name="P32" loext:marker-style-name="T99"><text:span text:style-name="T99">集合狀態：{a} {b} {c,e,f,g} {d}</text:span><text:span text:style-name="T99"/></text:p>
            <text:p text:style-name="P32" loext:marker-style-name="T99"><text:span text:style-name="T99">已選邊（3條）：(c,e)=2, (c,f)=3, (f,g)=6</text:span><text:span text:style-name="T99"/></text:p>
            <text:p text:style-name="P32" loext:marker-style-name="T99"><text:span text:style-name="T99">目前 MST： <text:s/>e──2──c──3──f──6──g</text:span><text:span text:style-name="T99"/></text:p>
          </table:table-cell>
        </table:table-row>
      </table:table>
      <text:p text:style-name="P5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24" loext:marker-style-name="T81"><text:span text:style-name="T83">Step 5</text:span><text:span text:style-name="T82">：加入 </text:span><text:span text:style-name="T83">(a,c)=9</text:span></text:p>
            <text:p text:style-name="P32" loext:marker-style-name="T99"><text:span text:style-name="T99">Find(a)=a <text:s text:c="3"/>Find(c)=c <text:s text:c="3"/>← 不同集合，可以加！</text:span><text:span text:style-name="T99"/></text:p>
            <text:p text:style-name="P32" loext:marker-style-name="T99"><text:span text:style-name="T99">Union(a, c)</text:span><text:span text:style-name="T99"/></text:p>
            <text:p text:style-name="P32" loext:marker-style-name="T99"><text:span text:style-name="T99">集合狀態：{a,c,e,f,g} {b} {d}</text:span><text:span text:style-name="T99"/></text:p>
            <text:p text:style-name="P32" loext:marker-style-name="T99"><text:span text:style-name="T99">已選邊（4條）：...+(a,c)=9</text:span><text:span text:style-name="T99"/></text:p>
            <text:p text:style-name="P32" loext:marker-style-name="T99"><text:span text:style-name="T99">目前 MST： <text:s text:c="4"/>a──9──c──3──f──6──g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2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e</text:span><text:span text:style-name="T99"/></text:p>
          </table:table-cell>
        </table:table-row>
      </table:table>
      <text:p text:style-name="P5"/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24" loext:marker-style-name="T81"><text:span text:style-name="T83">Step 6</text:span><text:span text:style-name="T82">：加入 </text:span><text:span text:style-name="T83">(a,d)=10</text:span></text:p>
            <text:p text:style-name="P32" loext:marker-style-name="T99"><text:span text:style-name="T99">Find(a)=a <text:s text:c="3"/>Find(d)=d <text:s text:c="3"/>← 不同集合，可以加！</text:span><text:span text:style-name="T99"/></text:p>
            <text:p text:style-name="P32" loext:marker-style-name="T99"><text:span text:style-name="T99">Union(a, d)</text:span><text:span text:style-name="T99"/></text:p>
            <text:p text:style-name="P32" loext:marker-style-name="T99"><text:span text:style-name="T99">集合狀態：{a,c,d,e,f,g} {b}</text:span><text:span text:style-name="T99"/></text:p>
            <text:p text:style-name="P32" loext:marker-style-name="T99"><text:span text:style-name="T99">已選邊（5條）：...+(a,d)=10</text:span><text:span text:style-name="T99"/></text:p>
            <text:p text:style-name="P32" loext:marker-style-name="T99"><text:span text:style-name="T99">目前 MST： <text:s text:c="4"/>d──10──a──9──c──3──f──6──g</text:span><text:span text:style-name="T99"/></text:p>
            <text:p text:style-name="P32" loext:marker-style-name="T99"><text:span text:style-name="T99"><text:s text:c="20"/>│ <text:s text:c="18"/>2</text:span><text:span text:style-name="T99"/></text:p>
            <text:p text:style-name="P32" loext:marker-style-name="T99"><text:span text:style-name="T99"><text:s text:c="20"/>│ <text:s text:c="18"/>│</text:span><text:span text:style-name="T99"/></text:p>
            <text:p text:style-name="P32" loext:marker-style-name="T99"><text:span text:style-name="T99"><text:s text:c="20"/>d <text:s text:c="18"/>e</text:span><text:span text:style-name="T99"/></text:p>
          </table:table-cell>
        </table:table-row>
      </table:table>
      <text:p text:style-name="P5"/>
      <table:table table:name="表格78" table:style-name="表格78">
        <table:table-column table:style-name="表格78.A"/>
        <table:table-row table:style-name="表格78.1">
          <table:table-cell table:style-name="表格78.A1" office:value-type="string">
            <text:p text:style-name="P24" loext:marker-style-name="T40"><text:span text:style-name="T41">Step 7</text:span><text:span text:style-name="T42">：看 </text:span><text:span text:style-name="T41">(c,d)=12 → ⛔ </text:span><text:span text:style-name="T42">跳過！</text:span></text:p>
            <text:p text:style-name="P32"><text:soft-page-break/><text:span text:style-name="T99">Find(c)=a <text:s text:c="3"/>Find(d)=a <text:s text:c="3"/>← 相同集合！</text:span></text:p>
            <text:p text:style-name="P32" loext:marker-style-name="T99"><text:span text:style-name="T99">為什麼？</text:span><text:span text:style-name="T99"/></text:p>
            <text:p text:style-name="P32" loext:marker-style-name="T99"><text:span text:style-name="T99"><text:s text:c="2"/>步驟5：a 和 c 合併 → {a,c,...}</text:span><text:span text:style-name="T99"/></text:p>
            <text:p text:style-name="P32" loext:marker-style-name="T99"><text:span text:style-name="T99"><text:s text:c="2"/>步驟6：a 和 d 合併 → {a,c,d,...}</text:span><text:span text:style-name="T99"/></text:p>
            <text:p text:style-name="P32" loext:marker-style-name="T99"><text:span text:style-name="T99"><text:s text:c="2"/>現在 c 和 d 都在同一組了！</text:span><text:span text:style-name="T99"/></text:p>
            <text:p text:style-name="P32" loext:marker-style-name="T99"><text:span text:style-name="T99">若加入 c─d：c─a─d─c 形成三角形迴路！</text:span><text:span text:style-name="T99"/></text:p>
            <text:p text:style-name="P32" loext:marker-style-name="T99"><text:span text:style-name="T99">⛔ 跳過 (c,d)=12</text:span><text:span text:style-name="T99"/></text:p>
          </table:table-cell>
        </table:table-row>
      </table:table>
      <text:p text:style-name="P5"/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24" loext:marker-style-name="T81"><text:span text:style-name="T83">Step 8</text:span><text:span text:style-name="T82">：加入 </text:span><text:span text:style-name="T83">(a,b)=13 ← </text:span><text:span text:style-name="T82">最後一條！</text:span></text:p>
            <text:p text:style-name="P32" loext:marker-style-name="T99"><text:span text:style-name="T99">Find(a)=a <text:s text:c="3"/>Find(b)=b <text:s text:c="3"/>← 不同集合，可以加！</text:span><text:span text:style-name="T99"/></text:p>
            <text:p text:style-name="P32" loext:marker-style-name="T99"><text:span text:style-name="T99">Union(a, b)</text:span><text:span text:style-name="T99"/></text:p>
            <text:p text:style-name="P32" loext:marker-style-name="T99"><text:span text:style-name="T99">集合狀態：{a,b,c,d,e,f,g} <text:s/>← 所有節點都在同一組！</text:span><text:span text:style-name="T99"/></text:p>
            <text:p text:style-name="P32" loext:marker-style-name="T99"><text:span text:style-name="T99">已選邊（6條）= V-1 = 7-1 = 6 <text:s/>✅ <text:s/>完成！</text:span><text:span text:style-name="T99"/></text:p>
            <text:p text:style-name="P32" loext:marker-style-name="T99"><text:span text:style-name="T99">最終 MST：</text:span><text:span text:style-name="T99"/></text:p>
            <text:p text:style-name="P32" loext:marker-style-name="T99"><text:span text:style-name="T99"><text:s text:c="2"/>b──13──a──9──c──3──f──6──g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8"/>10 <text:s text:c="3"/>2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9"/>d <text:s text:c="3"/>e</text:span><text:span text:style-name="T99"/></text:p>
          </table:table-cell>
        </table:table-row>
      </table:table>
      <text:p text:style-name="P5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24" loext:marker-style-name="T47"><text:span text:style-name="T48">✅ </text:span><text:span text:style-name="T49">最終答案</text:span></text:p>
            <text:p text:style-name="P16" loext:marker-style-name="T18"><text:span text:style-name="T20">MST </text:span><text:span text:style-name="T19">邊集合：</text:span><text:span text:style-name="T20">(c,e)=2, (c,f)=3, (f,g)=6, (a,c)=9, (a,d)=10, (a,b)=13</text:span></text:p>
            <text:p text:style-name="P16" loext:marker-style-name="T66"><text:span text:style-name="T67">總權重：</text:span><text:span text:style-name="T68">2 + 3 + 6 + 9 + 10 + 13 = 43</text:span></text:p>
            <text:p text:style-name="P41" loext:marker-style-name="T18"><text:span text:style-name="T19">邊數驗證：</text:span><text:span text:style-name="T20">V-1 = 7-1 = 6 </text:span><text:span text:style-name="T19">條 <text:s/>✅</text:span></text:p>
            <text:p text:style-name="P16" loext:marker-style-name="T66"><text:span text:style-name="T67">跳過原因整理：</text:span><text:span text:style-name="T66"/></text:p>
            <text:p text:style-name="P32" loext:marker-style-name="T84"><text:span text:style-name="T86"><text:s text:c="2"/>(e,f)=4 → c</text:span><text:span text:style-name="T85">、</text:span><text:span text:style-name="T86">e</text:span><text:span text:style-name="T85">、</text:span><text:span text:style-name="T86">f </text:span><text:span text:style-name="T85">已同集合，加了 </text:span><text:span text:style-name="T86">e─c─f─e </text:span><text:span text:style-name="T85">成三角形</text:span></text:p>
            <text:p text:style-name="P48" loext:marker-style-name="T84"><text:span text:style-name="T86"><text:s text:c="2"/>(c,d)=12 → c</text:span><text:span text:style-name="T85">、</text:span><text:span text:style-name="T86">d </text:span><text:span text:style-name="T85">已透過 </text:span><text:span text:style-name="T86">a </text:span><text:span text:style-name="T85">相連，加了 </text:span><text:span text:style-name="T86">c─a─d─c </text:span><text:span text:style-name="T85">成三角形</text:span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七、考試速查卡 ── 最終背誦版</text:span><text:span text:style-name="T21"/></text:h>
      <text:p text:style-name="P5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 loext:marker-style-name="T25"><text:span text:style-name="T26">⭐ Prim </text:span><text:span text:style-name="T27">三句口訣</text:span></text:p>
            <text:p text:style-name="P5" loext:marker-style-name="T18"><text:span text:style-name="T20">① </text:span><text:span text:style-name="T19">從任一節點出發，每次選「</text:span><text:span text:style-name="T20">T </text:span><text:span text:style-name="T19">內 → </text:span><text:span text:style-name="T20">T </text:span><text:span text:style-name="T19">外」最小邊。</text:span></text:p>
            <text:p text:style-name="P5" loext:marker-style-name="T18"><text:span text:style-name="T20">② </text:span><text:span text:style-name="T19">天然防止 </text:span><text:span text:style-name="T20">Cycle</text:span><text:span text:style-name="T19">，不需 </text:span><text:span text:style-name="T20">Union-Find</text:span><text:span text:style-name="T19">，也不需額外判斷。</text:span></text:p>
            <text:p text:style-name="P27" loext:marker-style-name="T18"><text:span text:style-name="T20">③ </text:span><text:span text:style-name="T19">矩陣版 </text:span><text:span text:style-name="T20">O(V²)</text:span><text:span text:style-name="T19">；</text:span><text:span text:style-name="T20">Heap </text:span><text:span text:style-name="T19">版 </text:span><text:span text:style-name="T20">O(E log V)</text:span><text:span text:style-name="T19">。稠密圖用矩陣版更省。</text:span></text:p>
          </table:table-cell>
        </table:table-row>
      </table:table>
      <text:p text:style-name="P5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 loext:marker-style-name="T25"><text:span text:style-name="T26">⭐ Kruskal </text:span><text:span text:style-name="T27">三句口訣</text:span></text:p>
            <text:p text:style-name="P5" loext:marker-style-name="T18"><text:span text:style-name="T20">① </text:span><text:span text:style-name="T19">所有邊排序（小→大），</text:span><text:span text:style-name="T20">Union-Find </text:span><text:span text:style-name="T19">逐一判斷是否成環。</text:span></text:p>
            <text:p text:style-name="P5" loext:marker-style-name="T18"><text:span text:style-name="T20">② </text:span><text:span text:style-name="T19">同集合 → 跳過；不同集合 → 加入、合併。</text:span></text:p>
            <text:p text:style-name="P27" loext:marker-style-name="T18"><text:span text:style-name="T20">③ </text:span><text:span text:style-name="T19">時間複雜度 </text:span><text:span text:style-name="T20">O(E log E)</text:span><text:span text:style-name="T19">，稀疏圖（邊少）時效率最好。</text:span></text:p>
          </table:table-cell>
        </table:table-row>
      </table:table>
      <text:p text:style-name="P5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6" loext:marker-style-name="T25"><text:span text:style-name="T26">⭐ Sollin </text:span><text:span text:style-name="T27">三句口訣</text:span></text:p>
            <text:p text:style-name="P5" loext:marker-style-name="T18"><text:span text:style-name="T20">① </text:span><text:span text:style-name="T19">每個 </text:span><text:span text:style-name="T20">Component </text:span><text:span text:style-name="T19">同時找自己最短外連邊，全體同時合併。</text:span></text:p>
            <text:p text:style-name="P5" loext:marker-style-name="T18"><text:span text:style-name="T20">② </text:span><text:span text:style-name="T19">每輪至少合併一半，最多 </text:span><text:span text:style-name="T20">log V </text:span><text:span text:style-name="T19">輪結束。</text:span></text:p>
            <text:p text:style-name="P27" loext:marker-style-name="T18"><text:span text:style-name="T20">③ </text:span><text:span text:style-name="T19">適合平行 </text:span><text:span text:style-name="T20">/ </text:span><text:span text:style-name="T19">分散式計算，時間複雜度 </text:span><text:span text:style-name="T20">O(E log V)</text:span><text:span text:style-name="T19">。</text:span></text:p>
          </table:table-cell>
        </table:table-row>
      </table:table>
      <text:p text:style-name="P5"/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6" loext:marker-style-name="T25"><text:span text:style-name="T26">⭐ MST </text:span><text:span text:style-name="T27">必背特性</text:span></text:p>
            <text:p text:style-name="P5" loext:marker-style-name="T18"><text:span text:style-name="T20">① V-1 </text:span><text:span text:style-name="T19">條邊：少一條有孤立點；多一條必有迴路。</text:span></text:p>
            <text:p text:style-name="P5" loext:marker-style-name="T18"><text:span text:style-name="T20">② </text:span><text:span text:style-name="T19">無 </text:span><text:span text:style-name="T20">Cycle</text:span><text:span text:style-name="T19">：有環必有冗餘邊，去掉更輕。</text:span></text:p>
            <text:p text:style-name="P5" loext:marker-style-name="T18"><text:span text:style-name="T20">③ </text:span><text:span text:style-name="T19">連通圖才有 </text:span><text:span text:style-name="T20">MST</text:span><text:span text:style-name="T19">；不連通 → 最小擴張森林。</text:span></text:p>
            <text:p text:style-name="P27" loext:marker-style-name="T18"><text:span text:style-name="T20">④ Cut Property</text:span><text:span text:style-name="T19">：任意把圖切成兩半，跨切割的最小邊必屬於某棵 </text:span><text:span text:style-name="T20">MST</text:span><text:span text:style-name="T19">；</text:span></text:p>
            <text:p text:style-name="P23" loext:marker-style-name="T61"><text:span text:style-name="T62">若該邊是跨越該 </text:span><text:span text:style-name="T63">Cut </text:span><text:span text:style-name="T62">的唯一最小邊，則它必屬於所有 </text:span><text:span text:style-name="T63">MST</text:span><text:span text:style-name="T62">。</text:span></text:p>
          </table:table-cell>
        </table:table-row>
      </table:table>
      <text:p text:style-name="P5"/>
      <table:table table:name="表格85" table:style-name="表格85">
        <table:table-column table:style-name="表格85.A"/>
        <table:table-column table:style-name="表格85.B"/>
        <table:table-column table:style-name="表格85.C"/>
        <table:table-column table:style-name="表格85.D"/>
        <table:table-column table:style-name="表格85.E"/>
        <table:table-row table:style-name="表格85.1">
          <table:table-cell table:style-name="表格85.A1" office:value-type="string">
            <text:p text:style-name="P5" loext:marker-style-name="T246"><text:span text:style-name="T247">演算法</text:span><text:span text:style-name="T246"/></text:p>
          </table:table-cell>
          <table:table-cell table:style-name="表格85.A1" office:value-type="string">
            <text:p text:style-name="P5" loext:marker-style-name="T246"><text:span text:style-name="T247">出發點</text:span><text:span text:style-name="T246"/></text:p>
          </table:table-cell>
          <table:table-cell table:style-name="表格85.A1" office:value-type="string">
            <text:p text:style-name="P5" loext:marker-style-name="T246"><text:span text:style-name="T247">核心操作</text:span><text:span text:style-name="T246"/></text:p>
          </table:table-cell>
          <table:table-cell table:style-name="表格85.A1" office:value-type="string">
            <text:p text:style-name="P5" loext:marker-style-name="T246"><text:span text:style-name="T247">時間複雜度</text:span><text:span text:style-name="T246"/></text:p>
          </table:table-cell>
          <table:table-cell table:style-name="表格85.A1" office:value-type="string">
            <text:p text:style-name="P5" loext:marker-style-name="T246"><text:span text:style-name="T247">適合圖型</text:span><text:span text:style-name="T246"/></text:p>
          </table:table-cell>
        </table:table-row>
        <table:table-row table:style-name="表格85.1">
          <table:table-cell table:style-name="表格85.A2" office:value-type="string">
            <text:p text:style-name="P5" loext:marker-style-name="T248"><text:span text:style-name="T249">Prim</text:span><text:span text:style-name="T248"/></text:p>
          </table:table-cell>
          <table:table-cell table:style-name="表格85.A2" office:value-type="string">
            <text:p text:style-name="P5" loext:marker-style-name="T248"><text:span text:style-name="T250">任一節點</text:span><text:span text:style-name="T248"/></text:p>
          </table:table-cell>
          <table:table-cell table:style-name="表格85.A2" office:value-type="string">
            <text:p text:style-name="P5" loext:marker-style-name="T248"><text:span text:style-name="T249">T</text:span><text:span text:style-name="T250">內→</text:span><text:span text:style-name="T249">T</text:span><text:span text:style-name="T250">外，選最小邊</text:span></text:p>
          </table:table-cell>
          <table:table-cell table:style-name="表格85.A2" office:value-type="string">
            <text:p text:style-name="P5" loext:marker-style-name="T248"><text:span text:style-name="T249">O(V²) / O(ElogV)</text:span><text:span text:style-name="T248"/></text:p>
          </table:table-cell>
          <table:table-cell table:style-name="表格85.A2" office:value-type="string">
            <text:p text:style-name="P5" loext:marker-style-name="T248"><text:span text:style-name="T250">稠密圖</text:span><text:span text:style-name="T248"/></text:p>
          </table:table-cell>
        </table:table-row>
        <table:table-row table:style-name="表格85.1">
          <table:table-cell table:style-name="表格85.A3" office:value-type="string">
            <text:p text:style-name="P5" loext:marker-style-name="T248"><text:span text:style-name="T249">Kruskal</text:span><text:span text:style-name="T248"/></text:p>
          </table:table-cell>
          <table:table-cell table:style-name="表格85.A3" office:value-type="string">
            <text:p text:style-name="P5" loext:marker-style-name="T248"><text:span text:style-name="T250">最小邊</text:span><text:span text:style-name="T248"/></text:p>
          </table:table-cell>
          <table:table-cell table:style-name="表格85.A3" office:value-type="string">
            <text:p text:style-name="P5" loext:marker-style-name="T248"><text:span text:style-name="T250">邊排序</text:span><text:span text:style-name="T249">+Union-Find</text:span></text:p>
          </table:table-cell>
          <table:table-cell table:style-name="表格85.A3" office:value-type="string">
            <text:p text:style-name="P5" loext:marker-style-name="T248"><text:span text:style-name="T249">O(E log E)</text:span><text:span text:style-name="T248"/></text:p>
          </table:table-cell>
          <table:table-cell table:style-name="表格85.A3" office:value-type="string">
            <text:p text:style-name="P5" loext:marker-style-name="T248"><text:span text:style-name="T250">稀疏圖</text:span><text:span text:style-name="T248"/></text:p>
          </table:table-cell>
        </table:table-row>
        <table:table-row table:style-name="表格85.1">
          <table:table-cell table:style-name="表格85.A2" office:value-type="string">
            <text:p text:style-name="P5" loext:marker-style-name="T248"><text:span text:style-name="T249">Sollin</text:span><text:span text:style-name="T248"/></text:p>
          </table:table-cell>
          <table:table-cell table:style-name="表格85.A2" office:value-type="string">
            <text:p text:style-name="P5" loext:marker-style-name="T248"><text:span text:style-name="T250">所有節點同時</text:span><text:span text:style-name="T248"/></text:p>
          </table:table-cell>
          <table:table-cell table:style-name="表格85.A2" office:value-type="string">
            <text:p text:style-name="P5" loext:marker-style-name="T248"><text:span text:style-name="T250">各</text:span><text:span text:style-name="T249">Component</text:span><text:span text:style-name="T250">找最短外連邊</text:span></text:p>
          </table:table-cell>
          <table:table-cell table:style-name="表格85.A2" office:value-type="string">
            <text:p text:style-name="P5" loext:marker-style-name="T248"><text:span text:style-name="T249">O(E log V)</text:span><text:span text:style-name="T248"/></text:p>
          </table:table-cell>
          <table:table-cell table:style-name="表格85.A2" office:value-type="string">
            <text:p text:style-name="P5" loext:marker-style-name="T248"><text:span text:style-name="T250">平行</text:span><text:span text:style-name="T249">/</text:span><text:span text:style-name="T250">分散式</text:span></text:p>
          </table:table-cell>
        </table:table-row>
      </table:table>
      <text:p text:style-name="P5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6" loext:marker-style-name="T25"><text:span text:style-name="T26">113</text:span><text:span text:style-name="T27">閩</text:span><text:span text:style-name="T26">Q5 </text:span><text:span text:style-name="T27">快速記憶</text:span></text:p>
            <text:p text:style-name="P25" loext:marker-style-name="T43"><text:span text:style-name="T43">跳過：(e,f)=4 → c,e,f 同集合 <text:s text:c="3"/>(c,d)=12 → c,d 已透過 a 相連</text:span><text:span text:style-name="T43"/></text:p>
            <text:p text:style-name="P36" loext:marker-style-name="T25"><text:span text:style-name="T26">MST</text:span><text:span text:style-name="T27">：</text:span><text:span text:style-name="T26">ce=2 + cf=3 + fg=6 + ac=9 + ad=10 + ab=13 = 43</text:span></text:p>
          </table:table-cell>
        </table:table-row>
      </table:table>
      <text:p text:style-name="P5"/>
      <text:p text:style-name="P5"/>
      <text:p text:style-name="P49" loext:marker-style-name="T251"><text:span text:style-name="T252">本筆記包含：名詞解釋 </text:span><text:span text:style-name="T253">× </text:span><text:span text:style-name="T252">完整圖解 </text:span><text:span text:style-name="T253">× </text:span><text:span text:style-name="T252">逐步推導 </text:span><text:span text:style-name="T253">× C++</text:span><text:span text:style-name="T252">程式實作 </text:span><text:span text:style-name="T253">× </text:span><text:span text:style-name="T252">公職真題</text:span><text:span text:style-name="T253">113</text:span><text:span text:style-name="T252">閩</text:span><text:span text:style-name="T253">Q5</text:span></text:p>
      <text:p text:style-name="P4" loext:marker-style-name="T254"><text:span text:style-name="T255">最小擴張樹 </text:span><text:span text:style-name="T256">MST </text:span><text:span text:style-name="T255">完整考試筆記 <text:s/></text:span><text:span text:style-name="T256">v3.1</text:span><text:span text:style-name="T255">（</text:span><text:span text:style-name="T256">1-2</text:span><text:span text:style-name="T255">章節改版）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" fo:font-family="Arial" style:font-family-generic="swiss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" fo:font-family="Arial" style:font-family-generic="swiss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fo:font-weight="bold" style:letter-kerning="false" style:font-name-asian="Arial1" style:font-family-asian="Arial" style:font-family-generic-asian="system" style:font-pitch-asian="variable" style:font-size-asian="11pt" style:language-asian="zh" style:country-asian="TW" style:font-weight-asian="bold" style:font-name-complex="Arial1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9pt" style:font-name-asian="Arial1" style:font-size-asian="9pt" style:font-name-complex="Arial1" style:font-size-complex="9pt"/>
    </style:style>
    <style:style style:name="MT2" style:family="text">
      <style:text-properties fo:color="#7f8c8d" loext:opacity="100%" style:font-name="Arial" fo:font-size="9pt" style:font-size-asian="9pt" style:font-name-complex="Arial1" style:font-size-complex="9pt"/>
    </style:style>
    <style:style style:name="MT3" style:family="text">
      <style:text-properties fo:color="#7f8c8d" loext:opacity="100%" fo:font-size="9pt" style:font-name-asian="Arial1" style:font-size-asian="9pt" style:font-name-complex="Arial1" style:font-size-complex="9pt"/>
    </style:style>
    <style:style style:name="MT4" style:family="text">
      <style:text-properties fo:color="#7f8c8d" loext:opacity="100%" fo:font-size="8pt" style:font-name-asian="Arial1" style:font-size-asian="8pt" style:font-name-complex="Arial1" style:font-size-complex="8pt"/>
    </style:style>
    <style:style style:name="MT5" style:family="text">
      <style:text-properties fo:color="#7f8c8d" loext:opacity="100%" style:font-name="Arial" fo:font-size="8pt" style:font-size-asian="8pt" style:font-name-complex="Arial1" style:font-size-complex="8pt"/>
    </style:style>
    <style:style style:name="MT6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【第</text:span><text:span text:style-name="MT3">15</text:span><text:span text:style-name="MT2">章】最小擴張樹 </text:span><text:span text:style-name="MT3">MST<text:tab/></text:span><text:span text:style-name="MT2">最小擴張樹完整考試筆記 </text:span><text:span text:style-name="MT3">v5.0</text:span></text:p>
      </style:header>
      <style:footer>
        <text:p text:style-name="MP2"><text:span text:style-name="MT4">MST </text:span><text:span text:style-name="MT5">完整筆記 </text:span><text:span text:style-name="MT4">v5.0<text:tab/></text:span><text:span text:style-name="MT5">第 </text:span><text:span text:style-name="MT6"><text:page-number text:select-page="current">29</text:page-number></text:span><text:span text:style-name="MT5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08:37:28</meta:creation-date>
    <meta:initial-creator>Un-named</meta:initial-creator>
    <dc:language>en-US</dc:language>
    <dc:date>2026-06-28T10:21:18</dc:date>
    <meta:editing-cycles>97</meta:editing-cycles>
    <meta:editing-duration>P1DT2H31M</meta:editing-duration>
    <meta:generator>LibreOffice/26.2.4.2$Windows_X86_64 LibreOffice_project/0229ac93fcf0d7cbc6376066c6f35021cef002dc</meta:generator>
    <meta:document-statistic meta:table-count="86" meta:image-count="6" meta:object-count="0" meta:page-count="29" meta:paragraph-count="932" meta:word-count="11965" meta:character-count="24409" meta:non-whitespace-character-count="18902"/>
    <meta:user-defined meta:name="AppVersion">15.0000</meta:user-defined>
  </office:meta>
</office:document-meta>
</file>