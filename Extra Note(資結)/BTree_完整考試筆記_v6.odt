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4.657cm"/>
    </style:style>
    <style:style style:name="表格7.B" style:family="table-column">
      <style:table-column-properties style:column-width="4.128cm"/>
    </style:style>
    <style:style style:name="表格7.C" style:family="table-column">
      <style:table-column-properties style:column-width="3.59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35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68" style:family="table">
      <style:table-properties style:width="16.51cm" fo:margin-left="0.035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9" style:family="table">
      <style:table-properties style:width="16.51cm" fo:margin-left="0.035cm" fo:margin-top="0cm" fo:margin-bottom="0cm" table:align="left" style:writing-mode="page"/>
    </style:style>
    <style:style style:name="表格69.A" style:family="table-column">
      <style:table-column-properties style:column-width="16.51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0" style:family="table">
      <style:table-properties style:width="16.51cm" fo:margin-left="0.035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1" style:family="table">
      <style:table-properties style:width="16.51cm" fo:margin-left="0.035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8.25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5" style:family="table">
      <style:table-properties style:width="16.51cm" fo:margin-left="0.035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2" style:family="table">
      <style:table-properties style:width="16.51cm" fo:margin-left="0.035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2.752cm"/>
    </style:style>
    <style:style style:name="表格73.B" style:family="table-column">
      <style:table-column-properties style:column-width="3.597cm"/>
    </style:style>
    <style:style style:name="表格73.C" style:family="table-column">
      <style:table-column-properties style:column-width="5.503cm"/>
    </style:style>
    <style:style style:name="表格73.D" style:family="table-column">
      <style:table-column-properties style:column-width="4.658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7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7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73.4" style:family="table-row">
      <style:table-row-properties style:min-row-height="0.413cm" fo:keep-together="auto"/>
    </style:style>
    <style:style style:name="表格74" style:family="table">
      <style:table-properties style:width="16.51cm" fo:margin-left="0.035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8.255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9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35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9" style:family="table">
      <style:table-properties style:width="15.875cm" fo:margin-left="0.012cm" fo:margin-top="0cm" fo:margin-bottom="0cm" table:align="left" style:writing-mode="page"/>
    </style:style>
    <style:style style:name="表格29.A" style:family="table-column">
      <style:table-column-properties style:column-width="15.875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30" style:family="table">
      <style:table-properties style:width="15.875cm" fo:margin-left="0.009cm" fo:margin-top="0cm" fo:margin-bottom="0cm" table:align="left" style:writing-mode="page"/>
    </style:style>
    <style:style style:name="表格30.A" style:family="table-column">
      <style:table-column-properties style:column-width="5.292cm"/>
    </style:style>
    <style:style style:name="表格30.B" style:family="table-column">
      <style:table-column-properties style:column-width="10.583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0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0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1" style:family="table">
      <style:table-properties style:width="15.875cm" fo:margin-left="0.012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32" style:family="table">
      <style:table-properties style:width="15.875cm" fo:margin-left="0.009cm" fo:margin-top="0cm" fo:margin-bottom="0cm" table:align="left" style:writing-mode="page"/>
    </style:style>
    <style:style style:name="表格32.A" style:family="table-column">
      <style:table-column-properties style:column-width="5.292cm"/>
    </style:style>
    <style:style style:name="表格32.B" style:family="table-column">
      <style:table-column-properties style:column-width="10.583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2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2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3" style:family="table">
      <style:table-properties style:width="15.875cm" fo:margin-left="0.012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34" style:family="table">
      <style:table-properties style:width="15.875cm" fo:margin-left="0.009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35" style:family="table">
      <style:table-properties style:width="15.875cm" fo:margin-left="0.012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36" style:family="table">
      <style:table-properties style:width="15.875cm" fo:margin-left="0.009cm" fo:margin-top="0cm" fo:margin-bottom="0cm" table:align="left" style:writing-mode="page"/>
    </style:style>
    <style:style style:name="表格36.A" style:family="table-column">
      <style:table-column-properties style:column-width="5.29cm"/>
    </style:style>
    <style:style style:name="表格36.B" style:family="table-column">
      <style:table-column-properties style:column-width="10.58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3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3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37" style:family="table">
      <style:table-properties style:width="15.875cm" fo:margin-left="0.009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38" style:family="table">
      <style:table-properties style:width="15.875cm" fo:margin-left="0.009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39" style:family="table">
      <style:table-properties style:width="15.875cm" fo:margin-left="0.012cm" fo:margin-top="0cm" fo:margin-bottom="0cm" table:align="left" style:writing-mode="page"/>
    </style:style>
    <style:style style:name="表格39.A" style:family="table-column">
      <style:table-column-properties style:column-width="15.875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8daef" fo:padding-left="0.353cm" fo:padding-right="0.353cm" fo:padding-top="0.247cm" fo:padding-bottom="0.247cm" fo:border="0.75pt solid #6c3483">
        <style:background-image/>
      </style:table-cell-properties>
    </style:style>
    <style:style style:name="表格75" style:family="table">
      <style:table-properties style:width="15.875cm" fo:margin-left="0.009cm" fo:margin-top="0cm" fo:margin-bottom="0cm" table:align="left" style:writing-mode="page"/>
    </style:style>
    <style:style style:name="表格75.A" style:family="table-column">
      <style:table-column-properties style:column-width="15.87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76" style:family="table">
      <style:table-properties style:width="15.875cm" fo:margin-left="0.009cm" fo:margin-top="0cm" fo:margin-bottom="0cm" table:align="left" style:writing-mode="page"/>
    </style:style>
    <style:style style:name="表格76.A" style:family="table-column">
      <style:table-column-properties style:column-width="15.875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77" style:family="table">
      <style:table-properties style:width="15.875cm" fo:margin-left="0.012cm" fo:margin-top="0cm" fo:margin-bottom="0cm" table:align="left" style:writing-mode="page"/>
    </style:style>
    <style:style style:name="表格77.A" style:family="table-column">
      <style:table-column-properties style:column-width="15.875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78" style:family="table">
      <style:table-properties style:width="15.875cm" fo:margin-left="0.009cm" fo:margin-top="0cm" fo:margin-bottom="0cm" table:align="left" style:writing-mode="page"/>
    </style:style>
    <style:style style:name="表格78.A" style:family="table-column">
      <style:table-column-properties style:column-width="5.29cm"/>
    </style:style>
    <style:style style:name="表格78.B" style:family="table-column">
      <style:table-column-properties style:column-width="10.585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78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78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79" style:family="table">
      <style:table-properties style:width="15.875cm" fo:margin-left="0.009cm" fo:margin-top="0cm" fo:margin-bottom="0cm" table:align="left" style:writing-mode="page"/>
    </style:style>
    <style:style style:name="表格79.A" style:family="table-column">
      <style:table-column-properties style:column-width="15.875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0" style:family="table">
      <style:table-properties style:width="15.875cm" fo:margin-left="0.009cm" fo:margin-top="0cm" fo:margin-bottom="0cm" table:align="left" style:writing-mode="page"/>
    </style:style>
    <style:style style:name="表格80.A" style:family="table-column">
      <style:table-column-properties style:column-width="15.875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1" style:family="table">
      <style:table-properties style:width="15.875cm" fo:margin-left="0.012cm" fo:margin-top="0cm" fo:margin-bottom="0cm" table:align="left" style:writing-mode="page"/>
    </style:style>
    <style:style style:name="表格81.A" style:family="table-column">
      <style:table-column-properties style:column-width="15.875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82" style:family="table">
      <style:table-properties style:width="15.875cm" fo:margin-left="0.009cm" fo:margin-top="0cm" fo:margin-bottom="0cm" table:align="left" style:writing-mode="page"/>
    </style:style>
    <style:style style:name="表格82.A" style:family="table-column">
      <style:table-column-properties style:column-width="15.875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83" style:family="table">
      <style:table-properties style:width="15.875cm" fo:margin-left="0.009cm" fo:margin-top="0cm" fo:margin-bottom="0cm" table:align="left" style:writing-mode="page"/>
    </style:style>
    <style:style style:name="表格83.A" style:family="table-column">
      <style:table-column-properties style:column-width="15.875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4" style:family="table">
      <style:table-properties style:width="15.875cm" fo:margin-left="0.009cm" fo:margin-top="0cm" fo:margin-bottom="0cm" table:align="left" style:writing-mode="page"/>
    </style:style>
    <style:style style:name="表格84.A" style:family="table-column">
      <style:table-column-properties style:column-width="15.875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85" style:family="table">
      <style:table-properties style:width="15.875cm" fo:margin-left="0.012cm" fo:margin-top="0cm" fo:margin-bottom="0cm" table:align="left" style:writing-mode="page"/>
    </style:style>
    <style:style style:name="表格85.A" style:family="table-column">
      <style:table-column-properties style:column-width="15.875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86" style:family="table">
      <style:table-properties style:width="15.875cm" fo:margin-left="0.009cm" fo:margin-top="0cm" fo:margin-bottom="0cm" table:align="left" style:writing-mode="page"/>
    </style:style>
    <style:style style:name="表格86.A" style:family="table-column">
      <style:table-column-properties style:column-width="15.875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e8daef" fo:padding-left="0.423cm" fo:padding-right="0.423cm" fo:padding-top="0.212cm" fo:padding-bottom="0.212cm" fo:border="0.5pt solid #6c3483">
        <style:background-image/>
      </style:table-cell-properties>
    </style:style>
    <style:style style:name="表格87" style:family="table">
      <style:table-properties style:width="15.875cm" fo:margin-left="0.012cm" fo:margin-top="0cm" fo:margin-bottom="0cm" table:align="left" style:writing-mode="page"/>
    </style:style>
    <style:style style:name="表格87.A" style:family="table-column">
      <style:table-column-properties style:column-width="15.87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88" style:family="table">
      <style:table-properties style:width="15.875cm" fo:margin-left="0.009cm" fo:margin-top="0cm" fo:margin-bottom="0cm" table:align="left" style:writing-mode="page"/>
    </style:style>
    <style:style style:name="表格88.A" style:family="table-column">
      <style:table-column-properties style:column-width="15.875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adbd8" fo:padding-left="0.423cm" fo:padding-right="0.423cm" fo:padding-top="0.212cm" fo:padding-bottom="0.212cm" fo:border="0.5pt solid #c0392b">
        <style:background-image/>
      </style:table-cell-properties>
    </style:style>
    <style:style style:name="表格89" style:family="table">
      <style:table-properties style:width="15.875cm" fo:margin-left="0.009cm" fo:margin-top="0cm" fo:margin-bottom="0cm" table:align="left" style:writing-mode="page"/>
    </style:style>
    <style:style style:name="表格89.A" style:family="table-column">
      <style:table-column-properties style:column-width="5.292cm"/>
    </style:style>
    <style:style style:name="表格89.B" style:family="table-column">
      <style:table-column-properties style:column-width="10.58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8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8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0" style:family="table">
      <style:table-properties style:width="15.875cm" fo:margin-left="0.012cm" fo:margin-top="0cm" fo:margin-bottom="0cm" table:align="left" style:writing-mode="page"/>
    </style:style>
    <style:style style:name="表格90.A" style:family="table-column">
      <style:table-column-properties style:column-width="15.87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4efed" fo:padding-left="0.353cm" fo:padding-right="0.353cm" fo:padding-top="0.247cm" fo:padding-bottom="0.247cm" fo:border="0.75pt solid #0d7377">
        <style:background-image/>
      </style:table-cell-properties>
    </style:style>
    <style:style style:name="表格91" style:family="table">
      <style:table-properties style:width="15.875cm" fo:margin-left="0.009cm" fo:margin-top="0cm" fo:margin-bottom="0cm" table:align="left" style:writing-mode="page"/>
    </style:style>
    <style:style style:name="表格91.A" style:family="table-column">
      <style:table-column-properties style:column-width="5.29cm"/>
    </style:style>
    <style:style style:name="表格91.B" style:family="table-column">
      <style:table-column-properties style:column-width="10.585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1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1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2" style:family="table">
      <style:table-properties style:width="15.875cm" fo:margin-left="0.009cm" fo:margin-top="0cm" fo:margin-bottom="0cm" table:align="left" style:writing-mode="page"/>
    </style:style>
    <style:style style:name="表格92.A" style:family="table-column">
      <style:table-column-properties style:column-width="15.875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d4efed" fo:padding-left="0.423cm" fo:padding-right="0.423cm" fo:padding-top="0.212cm" fo:padding-bottom="0.212cm" fo:border="0.5pt solid #0d7377">
        <style:background-image/>
      </style:table-cell-properties>
    </style:style>
    <style:style style:name="表格93" style:family="table">
      <style:table-properties style:width="15.875cm" fo:margin-left="0.009cm" fo:margin-top="0cm" fo:margin-bottom="0cm" table:align="left" style:writing-mode="page"/>
    </style:style>
    <style:style style:name="表格93.A" style:family="table-column">
      <style:table-column-properties style:column-width="15.875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d6e4f0" fo:padding-left="0.423cm" fo:padding-right="0.423cm" fo:padding-top="0.212cm" fo:padding-bottom="0.212cm" fo:border="0.5pt solid #1f5c99">
        <style:background-image/>
      </style:table-cell-properties>
    </style:style>
    <style:style style:name="表格94" style:family="table">
      <style:table-properties style:width="15.875cm" fo:margin-left="0.009cm" fo:margin-top="0cm" fo:margin-bottom="0cm" table:align="left" style:writing-mode="page"/>
    </style:style>
    <style:style style:name="表格94.A" style:family="table-column">
      <style:table-column-properties style:column-width="5.29cm"/>
    </style:style>
    <style:style style:name="表格94.B" style:family="table-column">
      <style:table-column-properties style:column-width="10.585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4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4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5" style:family="table">
      <style:table-properties style:width="15.875cm" fo:margin-left="0.009cm" fo:margin-top="0cm" fo:margin-bottom="0cm" table:align="left" style:writing-mode="page"/>
    </style:style>
    <style:style style:name="表格95.A" style:family="table-column">
      <style:table-column-properties style:column-width="15.875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6" style:family="table">
      <style:table-properties style:width="15.875cm" fo:margin-left="0.009cm" fo:margin-top="0cm" fo:margin-bottom="0cm" table:align="left" style:writing-mode="page"/>
    </style:style>
    <style:style style:name="表格96.A" style:family="table-column">
      <style:table-column-properties style:column-width="5.29cm"/>
    </style:style>
    <style:style style:name="表格96.B" style:family="table-column">
      <style:table-column-properties style:column-width="10.585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6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6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97" style:family="table">
      <style:table-properties style:width="15.875cm" fo:margin-left="0.012cm" fo:margin-top="0cm" fo:margin-bottom="0cm" table:align="left" style:writing-mode="page"/>
    </style:style>
    <style:style style:name="表格97.A" style:family="table-column">
      <style:table-column-properties style:column-width="15.875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98" style:family="table">
      <style:table-properties style:width="15.875cm" fo:margin-left="0.009cm" fo:margin-top="0cm" fo:margin-bottom="0cm" table:align="left" style:writing-mode="page"/>
    </style:style>
    <style:style style:name="表格98.A" style:family="table-column">
      <style:table-column-properties style:column-width="15.875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99" style:family="table">
      <style:table-properties style:width="15.875cm" fo:margin-left="0.009cm" fo:margin-top="0cm" fo:margin-bottom="0cm" table:align="left" style:writing-mode="page"/>
    </style:style>
    <style:style style:name="表格99.A" style:family="table-column">
      <style:table-column-properties style:column-width="5.29cm"/>
    </style:style>
    <style:style style:name="表格99.B" style:family="table-column">
      <style:table-column-properties style:column-width="10.585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1f5c99" fo:padding-left="0.247cm" fo:padding-right="0.247cm" fo:padding-top="0.141cm" fo:padding-bottom="0.141cm" fo:border="0.5pt solid #1f5c99">
        <style:background-image/>
      </style:table-cell-properties>
    </style:style>
    <style:style style:name="表格99.A2" style:family="table-cell">
      <style:table-cell-properties fo:background-color="#f2f3f4" fo:padding-left="0.247cm" fo:padding-right="0.247cm" fo:padding-top="0.141cm" fo:padding-bottom="0.141cm" fo:border="0.5pt solid #c0c0c0">
        <style:background-image/>
      </style:table-cell-properties>
    </style:style>
    <style:style style:name="表格99.A3" style:family="table-cell">
      <style:table-cell-properties fo:background-color="#ffffff" fo:padding-left="0.247cm" fo:padding-right="0.247cm" fo:padding-top="0.141cm" fo:padding-bottom="0.141cm" fo:border="0.5pt solid #c0c0c0">
        <style:background-image/>
      </style:table-cell-properties>
    </style:style>
    <style:style style:name="表格100" style:family="table">
      <style:table-properties style:width="15.875cm" fo:margin-left="0.009cm" fo:margin-top="0cm" fo:margin-bottom="0cm" table:align="left" style:writing-mode="page"/>
    </style:style>
    <style:style style:name="表格100.A" style:family="table-column">
      <style:table-column-properties style:column-width="15.875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d5f5e3" fo:padding-left="0.423cm" fo:padding-right="0.423cm" fo:padding-top="0.212cm" fo:padding-bottom="0.212cm" fo:border="0.5pt solid #1e8449">
        <style:background-image/>
      </style:table-cell-properties>
    </style:style>
    <style:style style:name="表格101" style:family="table">
      <style:table-properties style:width="15.875cm" fo:margin-left="0.012cm" fo:margin-top="0cm" fo:margin-bottom="0cm" table:align="left" style:writing-mode="page"/>
    </style:style>
    <style:style style:name="表格101.A" style:family="table-column">
      <style:table-column-properties style:column-width="15.875cm"/>
    </style:style>
    <style:style style:name="表格101.1" style:family="table-row">
      <style:table-row-properties fo:keep-together="auto"/>
    </style:style>
    <style:style style:name="表格101.A1" style:family="table-cell">
      <style:table-cell-properties fo:background-color="#fadbd8" fo:padding-left="0.353cm" fo:padding-right="0.353cm" fo:padding-top="0.247cm" fo:padding-bottom="0.247cm" fo:border="0.75pt solid #c0392b">
        <style:background-image/>
      </style:table-cell-properties>
    </style:style>
    <style:style style:name="表格102" style:family="table">
      <style:table-properties style:width="15.875cm" fo:margin-left="0.012cm" fo:margin-top="0cm" fo:margin-bottom="0cm" table:align="left" style:writing-mode="page"/>
    </style:style>
    <style:style style:name="表格102.A" style:family="table-column">
      <style:table-column-properties style:column-width="15.875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353cm" fo:padding-right="0.353cm" fo:padding-top="0.247cm" fo:padding-bottom="0.247cm" fo:border="0.75pt solid #1f5c99">
        <style:background-image/>
      </style:table-cell-properties>
    </style:style>
    <style:style style:name="表格103" style:family="table">
      <style:table-properties style:width="15.875cm" fo:margin-left="0.012cm" fo:margin-top="0cm" fo:margin-bottom="0cm" table:align="left" style:writing-mode="page"/>
    </style:style>
    <style:style style:name="表格103.A" style:family="table-column">
      <style:table-column-properties style:column-width="15.875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4" style:family="table">
      <style:table-properties style:width="15.875cm" fo:margin-left="0.012cm" fo:margin-top="0cm" fo:margin-bottom="0cm" table:align="left" style:writing-mode="page"/>
    </style:style>
    <style:style style:name="表格104.A" style:family="table-column">
      <style:table-column-properties style:column-width="15.875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5" style:family="table">
      <style:table-properties style:width="15.875cm" fo:margin-left="0.012cm" fo:margin-top="0cm" fo:margin-bottom="0cm" table:align="left" style:writing-mode="page"/>
    </style:style>
    <style:style style:name="表格105.A" style:family="table-column">
      <style:table-column-properties style:column-width="15.8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6" style:family="table">
      <style:table-properties style:width="15.875cm" fo:margin-left="0.012cm" fo:margin-top="0cm" fo:margin-bottom="0cm" table:align="left" style:writing-mode="page"/>
    </style:style>
    <style:style style:name="表格106.A" style:family="table-column">
      <style:table-column-properties style:column-width="15.875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7" style:family="table">
      <style:table-properties style:width="15.875cm" fo:margin-left="0.012cm" fo:margin-top="0cm" fo:margin-bottom="0cm" table:align="left" style:writing-mode="page"/>
    </style:style>
    <style:style style:name="表格107.A" style:family="table-column">
      <style:table-column-properties style:column-width="15.875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fef9e7" fo:padding-left="0.353cm" fo:padding-right="0.353cm" fo:padding-top="0.247cm" fo:padding-bottom="0.247cm" fo:border="0.75pt solid #f39c12">
        <style:background-image/>
      </style:table-cell-properties>
    </style:style>
    <style:style style:name="表格108" style:family="table">
      <style:table-properties style:width="15.875cm" fo:margin-left="0.012cm" fo:margin-top="0cm" fo:margin-bottom="0cm" table:align="left" style:writing-mode="page"/>
    </style:style>
    <style:style style:name="表格108.A" style:family="table-column">
      <style:table-column-properties style:column-width="15.87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5f5e3" fo:padding-left="0.353cm" fo:padding-right="0.353cm" fo:padding-top="0.247cm" fo:padding-bottom="0.247cm" fo:border="0.75pt solid #1e8449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B" style:family="table-column">
      <style:table-column-properties style:column-width="2.752cm"/>
    </style:style>
    <style:style style:name="表格40.D" style:family="table-column">
      <style:table-column-properties style:column-width="5.503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35cm" fo:margin-top="0cm" fo:margin-bottom="0cm" table:align="left" style:writing-mode="page"/>
    </style:style>
    <style:style style:name="表格42.A" style:family="table-column">
      <style:table-column-properties style:column-width="16.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43" style:family="table">
      <style:table-properties style:width="16.51cm" fo:margin-left="0.035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4.128cm"/>
    </style:style>
    <style:style style:name="表格44.C" style:family="table-column">
      <style:table-column-properties style:column-width="8.255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2.752cm"/>
    </style:style>
    <style:style style:name="表格46.B" style:family="table-column">
      <style:table-column-properties style:column-width="13.75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8.255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7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2" style:family="table">
      <style:table-properties style:width="16.51cm" fo:margin-left="0.035cm" fo:margin-top="0cm" fo:margin-bottom="0cm" table:align="left" style:writing-mode="page"/>
    </style:style>
    <style:style style:name="表格52.A" style:family="table-column">
      <style:table-column-properties style:column-width="16.5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35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5" style:family="table">
      <style:table-properties style:width="16.51cm" fo:margin-left="0.035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4.128cm"/>
    </style:style>
    <style:style style:name="表格56.B" style:family="table-column">
      <style:table-column-properties style:column-width="5.502cm"/>
    </style:style>
    <style:style style:name="表格56.C" style:family="table-column">
      <style:table-column-properties style:column-width="6.88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8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5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8.255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62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4.128cm"/>
    </style:style>
    <style:style style:name="表格63.B" style:family="table-column">
      <style:table-column-properties style:column-width="2.752cm"/>
    </style:style>
    <style:style style:name="表格63.C" style:family="table-column">
      <style:table-column-properties style:column-width="9.63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6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4" style:family="table">
      <style:table-properties style:width="16.51cm" fo:margin-left="0.035cm" fo:margin-top="0cm" fo:margin-bottom="0cm" table:align="left" style:writing-mode="page"/>
    </style:style>
    <style:style style:name="表格64.A" style:family="table-column">
      <style:table-column-properties style:column-width="16.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5" style:family="table">
      <style:table-properties style:width="16.51cm" fo:margin-left="0.035cm" fo:margin-top="0cm" fo:margin-bottom="0cm" table:align="left" style:writing-mode="page"/>
    </style:style>
    <style:style style:name="表格65.A" style:family="table-column">
      <style:table-column-properties style:column-width="16.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6" style:family="table">
      <style:table-properties style:width="16.51cm" fo:margin-left="0.035cm" fo:margin-top="0cm" fo:margin-bottom="0cm" table:align="left" style:writing-mode="page"/>
    </style:style>
    <style:style style:name="表格66.A" style:family="table-column">
      <style:table-column-properties style:column-width="16.5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7" style:family="table">
      <style:table-properties style:width="16.51cm" fo:margin-left="0.035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109" style:family="table">
      <style:table-properties style:width="16.51cm" fo:margin-left="0.035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3.173cm"/>
    </style:style>
    <style:style style:name="表格110.B" style:family="table-column">
      <style:table-column-properties style:column-width="7.62cm"/>
    </style:style>
    <style:style style:name="表格110.C" style:family="table-column">
      <style:table-column-properties style:column-width="5.717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1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1" style:family="table">
      <style:table-properties style:width="16.51cm" fo:margin-left="0.035cm" fo:margin-top="0cm" fo:margin-bottom="0cm" table:align="left" style:writing-mode="page"/>
    </style:style>
    <style:style style:name="表格111.A" style:family="table-column">
      <style:table-column-properties style:column-width="16.51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12" style:family="table">
      <style:table-properties style:width="16.51cm" fo:margin-left="0.035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" style:family="paragraph" style:parent-style-name="Standard">
      <style:paragraph-properties fo:margin-top="0.071cm" fo:margin-bottom="0.141cm" style:contextual-spacing="false" fo:text-align="center" style:justify-single-word="false"/>
      <style:text-properties officeooo:paragraph-rsid="00927941"/>
    </style:style>
    <style:style style:name="P3" style:family="paragraph" style:parent-style-name="Standard">
      <style:paragraph-properties fo:margin-top="2.54cm" fo:margin-bottom="0cm" style:contextual-spacing="false"/>
    </style:style>
    <style:style style:name="P4" style:family="paragraph" style:parent-style-name="Standard">
      <style:paragraph-properties fo:margin-top="0cm" fo:margin-bottom="0.282cm" style:contextual-spacing="false" fo:text-align="center" style:justify-single-word="false"/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P5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officeooo:paragraph-rsid="003cff76" style:font-name-asian="Arial3" style:font-size-asian="12pt" style:font-weight-asian="bold" style:font-name-complex="Arial3" style:font-size-complex="12pt" style:font-weight-complex="bold"/>
    </style:style>
    <style:style style:name="P6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7" style:family="paragraph" style:parent-style-name="Standard">
      <style:paragraph-properties fo:margin-top="0cm" fo:margin-bottom="0.706cm" style:contextual-spacing="false" fo:text-align="center" style:justify-single-word="false"/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8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officeooo:paragraph-rsid="006c3368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.141cm" fo:margin-bottom="0.141cm" style:contextual-spacing="false"/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cm" fo:margin-bottom="0.282cm" style:contextual-spacing="false" fo:text-align="center" style:justify-single-word="false"/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P11" style:family="paragraph" style:parent-style-name="Standard">
      <style:paragraph-properties fo:margin-top="0cm" fo:margin-bottom="1.411cm" style:contextual-spacing="false" fo:text-align="center" style:justify-single-word="false"/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P12" style:family="paragraph" style:parent-style-name="Standard">
      <style:paragraph-properties fo:margin-top="0cm" fo:margin-bottom="0.212cm" style:contextual-spacing="false" fo:text-align="center" style:justify-single-word="false"/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3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fo:font-size="11pt" style:font-size-asian="11pt" style:font-size-complex="11pt"/>
    </style:style>
    <style:style style:name="P14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15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16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3cff76" style:font-name-asian="Arial3" style:font-size-asian="13pt" style:font-weight-asian="bold" style:font-name-complex="Arial3" style:font-size-complex="13pt" style:font-weight-complex="bold"/>
    </style:style>
    <style:style style:name="P17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fo:color="#ffffff" loext:opacity="100%" style:font-name="Arial" fo:font-size="13pt" fo:font-weight="bold" officeooo:paragraph-rsid="006c3368" style:font-name-asian="Arial3" style:font-size-asian="13pt" style:font-weight-asian="bold" style:font-name-complex="Arial3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6c3368" style:font-name-asian="Arial3" style:font-size-asian="11pt" style:font-weight-asian="bold" style:font-name-complex="Arial3" style:font-size-complex="11pt" style:font-weight-complex="bold"/>
    </style:style>
    <style:style style:name="P20" style:family="paragraph" style:parent-style-name="Standard">
      <style:text-properties fo:color="#ffffff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color="#1abc9c" loext:opacity="100%" fo:font-size="10pt" style:font-size-asian="10pt" style:font-size-complex="10pt"/>
    </style:style>
    <style:style style:name="P22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.106cm" fo:margin-bottom="0.106cm" style:contextual-spacing="false"/>
      <style:text-properties fo:color="#1abc9c" loext:opacity="100%" fo:font-size="11pt" fo:font-weight="bold" officeooo:paragraph-rsid="003cff76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.141cm" fo:margin-bottom="0.141cm" style:contextual-spacing="false"/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.141cm" fo:margin-bottom="0.141cm" style:contextual-spacing="false"/>
      <style:text-properties fo:color="#1a1a1a" loext:opacity="100%" fo:font-size="11pt" style:font-size-asian="11pt" style:font-size-complex="11pt"/>
    </style:style>
    <style:style style:name="P26" style:family="paragraph" style:parent-style-name="Standard">
      <style:paragraph-properties fo:margin-top="0.071cm" fo:margin-bottom="0.071cm" style:contextual-spacing="false"/>
      <style:text-properties fo:color="#1a1a1a" loext:opacity="100%" fo:font-size="11pt" style:font-size-asian="11pt" style:font-size-complex="11pt"/>
    </style:style>
    <style:style style:name="P27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3cff76" style:font-size-asian="11pt" style:font-size-complex="11pt"/>
    </style:style>
    <style:style style:name="P28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3cff76" style:font-size-asian="11pt" style:font-size-complex="11pt"/>
    </style:style>
    <style:style style:name="P29" style:family="paragraph" style:parent-style-name="Standard">
      <style:paragraph-properties fo:margin-top="0.141cm" fo:margin-bottom="0.141cm" style:contextual-spacing="false"/>
      <style:text-properties fo:color="#1a1a1a" loext:opacity="100%" fo:font-size="11pt" officeooo:paragraph-rsid="006c3368" style:font-size-asian="11pt" style:font-size-complex="11pt"/>
    </style:style>
    <style:style style:name="P30" style:family="paragraph" style:parent-style-name="Standard">
      <style:paragraph-properties fo:margin-top="0.071cm" fo:margin-bottom="0.071cm" style:contextual-spacing="false"/>
      <style:text-properties fo:color="#1a1a1a" loext:opacity="100%" fo:font-size="11pt" officeooo:paragraph-rsid="006c3368" style:font-size-asian="11pt" style:font-size-complex="11pt"/>
    </style:style>
    <style:style style:name="P31" style:family="paragraph" style:parent-style-name="Standard">
      <style:paragraph-properties fo:margin-top="0.141cm" fo:margin-bottom="0cm" style:contextual-spacing="false"/>
      <style:text-properties fo:color="#1a1a1a" loext:opacity="100%" fo:font-size="11pt" style:font-size-asian="11pt" style:font-size-complex="11pt"/>
    </style:style>
    <style:style style:name="P32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33" style:family="paragraph" style:parent-style-name="Standard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P34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3cff76" style:font-name-asian="Courier New1" style:font-size-asian="10pt" style:font-name-complex="Courier New1" style:font-size-complex="10pt"/>
    </style:style>
    <style:style style:name="P35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36" style:family="paragraph" style:parent-style-name="Standard">
      <style:text-properties fo:color="#1a1a1a" loext:opacity="100%" style:font-name="Courier New" fo:font-size="10pt" officeooo:paragraph-rsid="006c3368" style:font-name-asian="Courier New1" style:font-size-asian="10pt" style:font-name-complex="Courier New1" style:font-size-complex="10pt"/>
    </style:style>
    <style:style style:name="P37" style:family="paragraph" style:parent-style-name="Standard">
      <style:paragraph-properties fo:margin-top="0.035cm" fo:margin-bottom="0.035cm" style:contextual-spacing="false"/>
      <style:text-properties fo:color="#1a1a1a" loext:opacity="100%" style:font-name="Courier New" fo:font-size="10pt" officeooo:paragraph-rsid="008089e6" style:font-name-asian="Courier New1" style:font-size-asian="10pt" style:font-name-complex="Courier New1" style:font-size-complex="10pt"/>
    </style:style>
    <style:style style:name="P38" style:family="paragraph" style:parent-style-name="Standard">
      <style:text-properties fo:color="#1a1a1a" loext:opacity="100%" style:font-name="Courier New" fo:font-size="10pt" officeooo:paragraph-rsid="00826183" style:font-name-asian="Courier New1" style:font-size-asian="10pt" style:font-name-complex="Courier New1" style:font-size-complex="10pt"/>
    </style:style>
    <style:style style:name="P39" style:family="paragraph" style:parent-style-name="Standard">
      <style:paragraph-properties fo:margin-top="0cm" fo:margin-bottom="0cm" style:contextual-spacing="false"/>
      <style:text-properties fo:color="#1a1a1a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40" style:family="paragraph" style:parent-style-name="Standard">
      <style:text-properties fo:color="#1a1a1a" loext:opacity="100%" style:font-name="Courier New" fo:font-size="10pt" fo:background-color="#c6ff00" style:font-name-asian="Courier New1" style:font-size-asian="10pt" style:font-name-complex="Courier New1" style:font-size-complex="10pt"/>
    </style:style>
    <style:style style:name="P41" style:family="paragraph" style:parent-style-name="Standard">
      <style:text-properties fo:color="#1a1a1a" loext:opacity="100%" style:font-name="Courier New" fo:font-size="10pt" fo:background-color="#64ffda" style:font-name-asian="Courier New1" style:font-size-asian="10pt" style:font-name-complex="Courier New1" style:font-size-complex="10pt"/>
    </style:style>
    <style:style style:name="P42" style:family="paragraph" style:parent-style-name="Standard">
      <style:text-properties fo:color="#1a1a1a" loext:opacity="100%" style:font-name="Courier New" fo:font-size="10pt" officeooo:paragraph-rsid="006c3368" fo:background-color="#ffff00" style:font-name-asian="Courier New1" style:font-size-asian="10pt" style:font-name-complex="Courier New1" style:font-size-complex="10pt"/>
    </style:style>
    <style:style style:name="P43" style:family="paragraph" style:parent-style-name="Standard">
      <style:text-properties fo:color="#1a1a1a" loext:opacity="100%" style:font-name="Courier New" fo:font-size="10pt" fo:font-weight="bold" fo:background-color="#c6ff00" style:font-name-asian="Courier New1" style:font-size-asian="10pt" style:font-weight-asian="bold" style:font-name-complex="Courier New1" style:font-size-complex="10pt" style:font-weight-complex="bold"/>
    </style:style>
    <style:style style:name="P44" style:family="paragraph" style:parent-style-name="Standard">
      <style:text-properties fo:color="#1a1a1a" loext:opacity="100%" style:font-name="Courier New" fo:font-size="10pt" fo:font-weight="bold" fo:background-color="#ffff00" style:font-name-asian="Courier New1" style:font-size-asian="10pt" style:font-weight-asian="bold" style:font-name-complex="Courier New1" style:font-size-complex="10pt" style:font-weight-complex="bold"/>
    </style:style>
    <style:style style:name="P45" style:family="paragraph" style:parent-style-name="Standard">
      <style:paragraph-properties fo:margin-top="0.141cm" fo:margin-bottom="0cm" style:contextual-spacing="false"/>
    </style:style>
    <style:style style:name="P46" style:family="paragraph" style:parent-style-name="Standard">
      <style:paragraph-properties fo:margin-top="0.282cm" fo:margin-bottom="0cm" style:contextual-spacing="false"/>
    </style:style>
    <style:style style:name="P47" style:family="paragraph" style:parent-style-name="Standard">
      <style:paragraph-properties fo:margin-top="0.141cm" fo:margin-bottom="0.141cm" style:contextual-spacing="false"/>
    </style:style>
    <style:style style:name="P48" style:family="paragraph" style:parent-style-name="Standard">
      <style:paragraph-properties fo:margin-top="0.212cm" fo:margin-bottom="0cm" style:contextual-spacing="false"/>
    </style:style>
    <style:style style:name="P49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top="0.106cm" fo:margin-bottom="0.106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51" style:family="paragraph" style:parent-style-name="Standard">
      <style:text-properties fo:color="#18ffff" loext:opacity="100%" style:font-name="Courier New" fo:font-size="10pt" fo:font-weight="bold" fo:background-color="#d500f9" style:font-name-asian="Courier New1" style:font-size-asian="10pt" style:font-weight-asian="bold" style:font-name-complex="Courier New1" style:font-size-complex="10pt" style:font-weight-complex="bold"/>
    </style:style>
    <style:style style:name="P52" style:family="paragraph" style:parent-style-name="Standard">
      <style:text-properties fo:color="#18ffff" loext:opacity="100%" style:font-name="Arial" fo:font-size="10pt" fo:font-weight="bold" officeooo:paragraph-rsid="00927941" fo:background-color="#d500f9" style:font-name-asian="Arial3" style:font-size-asian="10pt" style:font-weight-asian="bold" style:font-name-complex="Arial3" style:font-size-complex="10pt" style:font-weight-complex="bold"/>
    </style:style>
    <style:style style:name="P53" style:family="paragraph" style:parent-style-name="Standard">
      <style:paragraph-properties fo:margin-top="0.071cm" fo:margin-bottom="0.071cm" style:contextual-spacing="false"/>
    </style:style>
    <style:style style:name="P54" style:family="paragraph" style:parent-style-name="Standard">
      <style:paragraph-properties fo:margin-top="0.035cm" fo:margin-bottom="0.035cm" style:contextual-spacing="false"/>
    </style:style>
    <style:style style:name="P55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56" style:family="paragraph" style:parent-style-name="Standard">
      <style:paragraph-properties fo:margin-top="0.106cm" fo:margin-bottom="0.106cm" style:contextual-spacing="false"/>
      <style:text-properties fo:color="#e67e22" loext:opacity="100%" fo:font-size="11pt" fo:font-weight="bold" officeooo:paragraph-rsid="003cff76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top="0.141cm" fo:margin-bottom="0.141cm" style:contextual-spacing="false"/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P58" style:family="paragraph" style:parent-style-name="Standard">
      <style:paragraph-properties fo:margin-top="0.141cm" fo:margin-bottom="0cm" style:contextual-spacing="false"/>
      <style:text-properties officeooo:paragraph-rsid="003cff76"/>
    </style:style>
    <style:style style:name="P59" style:family="paragraph" style:parent-style-name="Standard">
      <style:paragraph-properties fo:margin-top="0.141cm" fo:margin-bottom="0.141cm" style:contextual-spacing="false"/>
      <style:text-properties officeooo:paragraph-rsid="003cff76"/>
    </style:style>
    <style:style style:name="P60" style:family="paragraph" style:parent-style-name="Standard">
      <style:paragraph-properties fo:margin-top="0.035cm" fo:margin-bottom="0.035cm" style:contextual-spacing="false"/>
      <style:text-properties officeooo:paragraph-rsid="003cff76"/>
    </style:style>
    <style:style style:name="P61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03cff76"/>
    </style:style>
    <style:style style:name="P62" style:family="paragraph" style:parent-style-name="Standard">
      <style:paragraph-properties fo:margin-top="0.035cm" fo:margin-bottom="0.035cm" style:contextual-spacing="false"/>
      <style:text-properties fo:color="#ff3d00" loext:opacity="100%" style:font-name="Courier New" fo:font-size="10pt" fo:font-weight="bold" fo:background-color="#64ffda" style:font-name-asian="Courier New1" style:font-size-asian="10pt" style:font-weight-asian="bold" style:font-name-complex="Courier New1" style:font-size-complex="10pt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ff3d00" loext:opacity="100%" style:font-name="Arial" fo:font-size="11pt" fo:font-weight="bold" officeooo:paragraph-rsid="006c3368" fo:background-color="#64ffda" style:font-name-asian="Arial3" style:font-size-asian="11pt" style:font-weight-asian="bold" style:font-name-complex="Arial3" style:font-size-complex="11pt" style:font-weight-complex="bold"/>
    </style:style>
    <style:style style:name="P64" style:family="paragraph" style:parent-style-name="Standard">
      <style:text-properties fo:color="#ff3d00" loext:opacity="100%" style:font-name="Arial" fo:font-size="10pt" fo:font-weight="bold" officeooo:paragraph-rsid="00927941" fo:background-color="#64ffda" style:font-name-asian="Arial3" style:font-size-asian="10pt" style:font-weight-asian="bold" style:font-name-complex="Arial3" style:font-size-complex="10pt" style:font-weight-complex="bold"/>
    </style:style>
    <style:style style:name="P65" style:family="paragraph" style:parent-style-name="Standard">
      <style:paragraph-properties fo:margin-top="0.141cm" fo:margin-bottom="0.141cm" style:contextual-spacing="false"/>
      <style:text-properties officeooo:paragraph-rsid="006c3368"/>
    </style:style>
    <style:style style:name="P66" style:family="paragraph" style:parent-style-name="Standard">
      <style:paragraph-properties fo:margin-top="0.141cm" fo:margin-bottom="0cm" style:contextual-spacing="false"/>
      <style:text-properties officeooo:paragraph-rsid="006c3368"/>
    </style:style>
    <style:style style:name="P67" style:family="paragraph" style:parent-style-name="Standard">
      <style:paragraph-properties fo:margin-top="0.035cm" fo:margin-bottom="0.035cm" style:contextual-spacing="false"/>
      <style:text-properties officeooo:paragraph-rsid="006c3368"/>
    </style:style>
    <style:style style:name="P68" style:family="paragraph" style:parent-style-name="Standard">
      <style:paragraph-properties fo:margin-top="0.071cm" fo:margin-bottom="0.071cm" style:contextual-spacing="false"/>
      <style:text-properties officeooo:paragraph-rsid="006c3368"/>
    </style:style>
    <style:style style:name="P69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officeooo:paragraph-rsid="006c3368" style:font-size-asian="11pt" style:font-weight-asian="bold" style:font-size-complex="11pt" style:font-weight-complex="bold"/>
    </style:style>
    <style:style style:name="P70" style:family="paragraph" style:parent-style-name="Standard">
      <style:paragraph-properties fo:margin-top="0.106cm" fo:margin-bottom="0.106cm" style:contextual-spacing="false"/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P71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72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73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1f5c99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74" style:family="paragraph" style:parent-style-name="Heading_20_1">
      <style:paragraph-properties fo:margin-top="0.847cm" fo:margin-bottom="0.282cm" style:contextual-spacing="false"/>
      <style:text-properties fo:color="#1f5c99" loext:opacity="100%" style:font-name="Arial" fo:font-size="18pt" fo:font-weight="bold" officeooo:paragraph-rsid="00927941" style:font-name-asian="Arial3" style:font-size-asian="18pt" style:font-weight-asian="bold" style:font-name-complex="Arial3" style:font-size-complex="18pt" style:font-weight-complex="bold"/>
    </style:style>
    <style:style style:name="P75" style:family="paragraph" style:parent-style-name="Standard">
      <style:paragraph-properties fo:margin-top="0.071cm" fo:margin-bottom="0.141cm" style:contextual-spacing="false"/>
      <style:text-properties fo:color="#1f5c9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76" style:family="paragraph" style:parent-style-name="Standard">
      <style:paragraph-properties fo:margin-top="0.071cm" fo:margin-bottom="0.141cm" style:contextual-spacing="false" fo:text-align="center" style:justify-single-word="false"/>
      <style:text-properties fo:color="#1f5c99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77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555555" loext:opacity="100%" style:font-name="Arial" fo:font-size="12pt" fo:font-weight="normal" officeooo:paragraph-rsid="00927941" style:font-name-asian="Arial3" style:font-size-asian="12pt" style:font-weight-asian="normal" style:font-name-complex="Arial3" style:font-size-complex="12pt" style:font-weight-complex="normal"/>
    </style:style>
    <style:style style:name="P78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normal" officeooo:paragraph-rsid="00927941" style:font-name-asian="Arial3" style:font-size-asian="11pt" style:font-weight-asian="normal" style:font-name-complex="Arial3" style:font-size-complex="11pt" style:font-weight-complex="normal"/>
    </style:style>
    <style:style style:name="P79" style:family="paragraph" style:parent-style-name="Standard">
      <style:paragraph-properties fo:margin-top="0cm" fo:margin-bottom="0.106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80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1pt" officeooo:paragraph-rsid="00927941" style:font-name-asian="Arial3" style:font-size-asian="11pt" style:font-name-complex="Arial3" style:font-size-complex="11pt"/>
    </style:style>
    <style:style style:name="P81" style:family="paragraph" style:parent-style-name="Standard">
      <style:paragraph-properties fo:margin-top="0.106cm" fo:margin-bottom="0.106cm" style:contextual-spacing="false" fo:text-align="start" style:justify-single-word="false"/>
      <style:text-properties fo:color="#555555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82" style:family="paragraph" style:parent-style-name="Standard">
      <style:text-properties fo:color="#555555" loext:opacity="100%" style:font-name="Arial" fo:font-size="10pt" fo:font-weight="normal" officeooo:paragraph-rsid="00927941" style:font-name-asian="Arial3" style:font-size-asian="10pt" style:font-weight-asian="normal" style:font-name-complex="Arial3" style:font-size-complex="10pt" style:font-weight-complex="normal"/>
    </style:style>
    <style:style style:name="P83" style:family="paragraph" style:parent-style-name="Standard">
      <style:paragraph-properties fo:margin-top="0cm" fo:margin-bottom="0.071cm" style:contextual-spacing="false" fo:text-align="center" style:justify-single-word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84" style:family="paragraph" style:parent-style-name="Standard">
      <style:paragraph-properties fo:margin-top="0.071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85" style:family="paragraph" style:parent-style-name="Standard">
      <style:paragraph-properties fo:margin-top="0cm" fo:margin-bottom="0.07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86" style:family="paragraph" style:parent-style-name="Standard">
      <style:paragraph-properties fo:margin-top="0.071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87" style:family="paragraph" style:parent-style-name="Standard">
      <style:paragraph-properties fo:margin-top="0cm" fo:margin-bottom="0.106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88" style:family="paragraph" style:parent-style-name="Standard">
      <style:paragraph-properties fo:margin-top="0cm" fo:margin-bottom="0.141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89" style:family="paragraph" style:parent-style-name="Standard">
      <style:paragraph-properties fo:margin-top="0cm" fo:margin-bottom="0.035cm" style:contextual-spacing="false"/>
      <style:text-properties fo:color="#555555" loext:opacity="100%" style:font-name="Arial" fo:font-size="10pt" officeooo:paragraph-rsid="00927941" style:font-name-asian="Arial3" style:font-size-asian="10pt" style:font-name-complex="Arial3" style:font-size-complex="10pt"/>
    </style:style>
    <style:style style:name="P90" style:family="paragraph" style:parent-style-name="Standard">
      <style:text-properties fo:color="#555555" loext:opacity="100%" style:font-name="Arial" fo:font-size="10pt" fo:font-weight="bold" officeooo:paragraph-rsid="00927941" fo:background-color="#ffff00" style:font-name-asian="Arial3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paragraph-properties fo:margin-top="0cm" fo:margin-bottom="0.071cm" style:contextual-spacing="false"/>
      <style:text-properties fo:color="#555555" loext:opacity="100%" style:font-name="Courier New" fo:font-size="10pt" officeooo:paragraph-rsid="00927941" style:font-name-asian="Courier New1" style:font-size-asian="10pt" style:font-name-complex="Courier New1" style:font-size-complex="10pt"/>
    </style:style>
    <style:style style:name="P92" style:family="paragraph" style:parent-style-name="Standard">
      <style:paragraph-properties fo:margin-top="0.106cm" fo:margin-bottom="0.106cm" style:contextual-spacing="false"/>
      <style:text-properties officeooo:paragraph-rsid="00927941"/>
    </style:style>
    <style:style style:name="P93" style:family="paragraph" style:parent-style-name="Standard">
      <style:text-properties officeooo:paragraph-rsid="00927941"/>
    </style:style>
    <style:style style:name="P94" style:family="paragraph" style:parent-style-name="Standard">
      <style:paragraph-properties fo:margin-top="0cm" fo:margin-bottom="0.071cm" style:contextual-spacing="false"/>
      <style:text-properties officeooo:paragraph-rsid="00927941"/>
    </style:style>
    <style:style style:name="P95" style:family="paragraph" style:parent-style-name="Heading_20_1">
      <style:paragraph-properties fo:margin-top="0.847cm" fo:margin-bottom="0.282cm" style:contextual-spacing="false"/>
      <style:text-properties officeooo:paragraph-rsid="00927941"/>
    </style:style>
    <style:style style:name="P96" style:family="paragraph" style:parent-style-name="Standard">
      <style:paragraph-properties fo:margin-top="0.071cm" fo:margin-bottom="0.141cm" style:contextual-spacing="false"/>
      <style:text-properties officeooo:paragraph-rsid="00927941"/>
    </style:style>
    <style:style style:name="P97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officeooo:paragraph-rsid="00927941"/>
    </style:style>
    <style:style style:name="P98" style:family="paragraph" style:parent-style-name="Standard">
      <style:paragraph-properties fo:margin-top="0cm" fo:margin-bottom="0cm" style:contextual-spacing="false"/>
      <style:text-properties officeooo:paragraph-rsid="00927941"/>
    </style:style>
    <style:style style:name="P99" style:family="paragraph" style:parent-style-name="Standard"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0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1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02" style:family="paragraph" style:parent-style-name="Standard">
      <style:text-properties fo:color="#0d7377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03" style:family="paragraph" style:parent-style-name="Standard">
      <style:text-properties fo:color="#0d7377" loext:opacity="100%" style:font-name="Arial" fo:font-size="10pt" fo:font-weight="bold" officeooo:paragraph-rsid="00927941" fo:background-color="#76ff03" style:font-name-asian="Arial3" style:font-size-asian="10pt" style:font-weight-asian="bold" style:font-name-complex="Arial3" style:font-size-complex="10pt" style:font-weight-complex="bold"/>
    </style:style>
    <style:style style:name="P104" style:family="paragraph" style:parent-style-name="Standard">
      <style:paragraph-properties fo:margin-top="0.071cm" fo:margin-bottom="0.14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05" style:family="paragraph" style:parent-style-name="Standard">
      <style:paragraph-properties fo:margin-top="0.106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06" style:family="paragraph" style:parent-style-name="Standard">
      <style:paragraph-properties fo:margin-top="0cm" fo:margin-bottom="0.071cm" style:contextual-spacing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07" style:family="paragraph" style:parent-style-name="Standard">
      <style:paragraph-properties fo:margin-top="0.106cm" fo:margin-bottom="0.106cm" style:contextual-spacing="false" fo:text-align="start" style:justify-single-word="false"/>
      <style:text-properties fo:color="#0d7377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08" style:family="paragraph" style:parent-style-name="Heading_20_2">
      <style:paragraph-properties fo:margin-top="0.564cm" fo:margin-bottom="0.212cm" style:contextual-spacing="false" fo:padding-left="0cm" fo:padding-right="0cm" fo:padding-top="0cm" fo:padding-bottom="0.071cm" fo:border-left="none" fo:border-right="none" fo:border-top="none" fo:border-bottom="0.51pt solid #0d7377"/>
      <style:text-properties fo:color="#0d7377" loext:opacity="100%" style:font-name="Arial" fo:font-size="14pt" fo:font-weight="bold" officeooo:paragraph-rsid="00927941" style:font-name-asian="Arial3" style:font-size-asian="14pt" style:font-weight-asian="bold" style:font-name-complex="Arial3" style:font-size-complex="14pt" style:font-weight-complex="bold"/>
    </style:style>
    <style:style style:name="P109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0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1" style:family="paragraph" style:parent-style-name="Standard">
      <style:paragraph-properties fo:margin-top="0cm" fo:margin-bottom="0.071cm" style:contextual-spacing="false"/>
      <style:text-properties fo:color="#1e8449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2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3" style:family="paragraph" style:parent-style-name="Standard">
      <style:paragraph-properties fo:margin-top="0cm" fo:margin-bottom="0.07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4" style:family="paragraph" style:parent-style-name="Standard">
      <style:paragraph-properties fo:margin-top="0cm" fo:margin-bottom="0.141cm" style:contextual-spacing="false"/>
      <style:text-properties fo:color="#c0392b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15" style:family="paragraph" style:parent-style-name="Standard">
      <style:paragraph-properties fo:margin-top="0.071cm" fo:margin-bottom="0.141cm" style:contextual-spacing="false"/>
      <style:text-properties fo:color="#c0392b" loext:opacity="100%" style:font-name="Arial" fo:font-size="11pt" fo:font-weight="bold" officeooo:paragraph-rsid="00927941" style:font-name-asian="Arial3" style:font-size-asian="11pt" style:font-weight-asian="bold" style:font-name-complex="Arial3" style:font-size-complex="11pt" style:font-weight-complex="bold"/>
    </style:style>
    <style:style style:name="P116" style:family="paragraph" style:parent-style-name="Standard">
      <style:paragraph-properties fo:margin-top="0.106cm" fo:margin-bottom="0.106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17" style:family="paragraph" style:parent-style-name="Standard">
      <style:paragraph-properties fo:margin-top="0.141cm" fo:margin-bottom="0.141cm" style:contextual-spacing="false"/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P118" style:family="paragraph" style:parent-style-name="Standard">
      <style:paragraph-properties fo:margin-top="0.106cm" fo:margin-bottom="0.106cm" style:contextual-spacing="false" fo:text-align="start" style:justify-single-word="false"/>
      <style:text-properties officeooo:paragraph-rsid="00927941"/>
    </style:style>
    <style:style style:name="P119" style:family="paragraph" style:parent-style-name="Standard">
      <style:paragraph-properties fo:margin-top="0.071cm" fo:margin-bottom="0.176cm" style:contextual-spacing="false" fo:text-align="center" style:justify-single-word="false"/>
      <style:text-properties fo:color="#6c3483" loext:opacity="100%" style:font-name="Arial" fo:font-size="13pt" fo:font-weight="bold" officeooo:paragraph-rsid="00927941" style:font-name-asian="Arial3" style:font-size-asian="13pt" style:font-weight-asian="bold" style:font-name-complex="Arial3" style:font-size-complex="13pt" style:font-weight-complex="bold"/>
    </style:style>
    <style:style style:name="P120" style:family="paragraph" style:parent-style-name="Standard">
      <style:paragraph-properties fo:margin-top="0.071cm" fo:margin-bottom="0.14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1" style:family="paragraph" style:parent-style-name="Standard">
      <style:paragraph-properties fo:margin-top="0cm" fo:margin-bottom="0.071cm" style:contextual-spacing="false"/>
      <style:text-properties fo:color="#6c3483" loext:opacity="100%" style:font-name="Arial" fo:font-size="10pt" fo:font-weight="bold" officeooo:paragraph-rsid="00927941" style:font-name-asian="Arial3" style:font-size-asian="10pt" style:font-weight-asian="bold" style:font-name-complex="Arial3" style:font-size-complex="10pt" style:font-weight-complex="bold"/>
    </style:style>
    <style:style style:name="P122" style:family="paragraph" style:parent-style-name="Standard">
      <style:text-properties fo:color="#76ff03" loext:opacity="100%" style:font-name="Arial" fo:font-size="10pt" fo:font-weight="bold" officeooo:paragraph-rsid="00927941" fo:background-color="#f50057" style:font-name-asian="Arial3" style:font-size-asian="10pt" style:font-weight-asian="bold" style:font-name-complex="Arial3" style:font-size-complex="10pt" style:font-weight-complex="bold"/>
    </style:style>
    <style:style style:name="P123" style:family="paragraph" style:parent-style-name="Standard">
      <style:text-properties fo:color="#ff6e40" loext:opacity="100%" style:font-name="Arial" fo:font-size="10pt" fo:font-weight="bold" officeooo:paragraph-rsid="00927941" fo:background-color="#536dfe" style:font-name-asian="Arial3" style:font-size-asian="10pt" style:font-weight-asian="bold" style:font-name-complex="Arial3" style:font-size-complex="10pt" style:font-weight-complex="bold"/>
    </style:style>
    <style:style style:name="P124" style:family="paragraph" style:parent-style-name="Standard">
      <style:text-properties fo:color="#c6ff00" loext:opacity="100%" style:font-name="Courier New" fo:font-size="10pt" fo:font-weight="bold" fo:background-color="#f50057" style:font-name-asian="Courier New1" style:font-size-asian="10pt" style:font-weight-asian="bold" style:font-name-complex="Courier New1" style:font-size-complex="10pt" style:font-weight-complex="bold"/>
    </style:style>
    <style:style style:name="P125" style:family="paragraph" style:parent-style-name="Standard">
      <style:paragraph-properties fo:margin-top="0.106cm" fo:margin-bottom="0.106cm" style:contextual-spacing="false"/>
      <style:text-properties fo:color="#8e44ad" loext:opacity="100%" fo:font-size="11pt" fo:font-weight="bold" style:font-size-asian="11pt" style:font-weight-asian="bold" style:font-size-complex="11pt" style:font-weight-complex="bold"/>
    </style:style>
    <style:style style:name="P126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</style:style>
    <style:style style:name="P127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  <style:text-properties officeooo:paragraph-rsid="01304d2b"/>
    </style:style>
    <style:style style:name="P128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  <style:text-properties officeooo:paragraph-rsid="01304d2b"/>
    </style:style>
    <style:style style:name="P129" style:family="paragraph" style:parent-style-name="List_20_Paragraph" style:list-style-name="WWNum2">
      <style:paragraph-properties fo:margin-top="0.106cm" fo:margin-bottom="0.106cm" style:contextual-spacing="false"/>
      <style:text-properties fo:color="#1a1a1a" loext:opacity="100%" fo:font-size="11pt" style:font-size-asian="11pt" style:font-size-complex="11pt"/>
    </style:style>
    <style:style style:name="P130" style:family="paragraph" style:parent-style-name="Standard">
      <style:paragraph-properties fo:text-align="center" style:justify-single-word="false"/>
      <style:text-properties officeooo:paragraph-rsid="01304d2b"/>
    </style:style>
    <style:style style:name="P131" style:family="paragraph" style:parent-style-name="Standard">
      <style:paragraph-properties fo:margin-top="0.071cm" fo:margin-bottom="0.141cm" style:contextual-spacing="false"/>
      <style:text-properties fo:color="#1e8449" loext:opacity="100%" style:font-name="Arial" fo:font-size="10pt" fo:font-weight="bold" officeooo:paragraph-rsid="00927941" fo:background-color="#ffd740" style:font-name-asian="Arial3" style:font-size-asian="10pt" style:font-weight-asian="bold" style:font-name-complex="Arial3" style:font-size-complex="10pt" style:font-weight-complex="bold"/>
    </style:style>
    <style:style style:name="P132" style:family="paragraph" style:parent-style-name="Standard">
      <style:paragraph-properties fo:margin-top="0.071cm" fo:margin-bottom="0.071cm" style:contextual-spacing="false"/>
      <style:text-properties fo:color="#18ffff" loext:opacity="100%" fo:font-size="11pt" fo:font-weight="bold" fo:background-color="#d500f9" style:font-size-asian="11pt" style:font-weight-asian="bold" style:font-size-complex="11pt" style:font-weight-complex="bold"/>
    </style:style>
    <style:style style:name="P133" style:family="paragraph" style:parent-style-name="Standard">
      <style:paragraph-properties fo:margin-top="0.141cm" fo:margin-bottom="0cm" style:contextual-spacing="false"/>
    </style:style>
    <style:style style:name="P134" style:family="paragraph" style:parent-style-name="Standard">
      <style:paragraph-properties fo:margin-top="0.106cm" fo:margin-bottom="0.106cm" style:contextual-spacing="false"/>
      <style:text-properties officeooo:paragraph-rsid="01304d2b"/>
    </style:style>
    <style:style style:name="P135" style:family="paragraph" style:parent-style-name="Standard">
      <style:paragraph-properties fo:margin-top="0.071cm" fo:margin-bottom="0.071cm" style:contextual-spacing="false"/>
      <style:text-properties officeooo:paragraph-rsid="01304d2b"/>
    </style:style>
    <style:style style:name="P136" style:family="paragraph" style:parent-style-name="Standard">
      <style:paragraph-properties fo:margin-top="0.141cm" fo:margin-bottom="0cm" style:contextual-spacing="false"/>
      <style:text-properties officeooo:paragraph-rsid="01304d2b"/>
    </style:style>
    <style:style style:name="P137" style:family="paragraph" style:parent-style-name="Standard">
      <style:paragraph-properties fo:margin-top="0.141cm" fo:margin-bottom="0.141cm" style:contextual-spacing="false"/>
      <style:text-properties officeooo:paragraph-rsid="01304d2b"/>
    </style:style>
    <style:style style:name="P138" style:family="paragraph" style:parent-style-name="Standard">
      <style:text-properties officeooo:paragraph-rsid="01304d2b"/>
    </style:style>
    <style:style style:name="P139" style:family="paragraph" style:parent-style-name="Standard">
      <style:paragraph-properties fo:margin-top="0.035cm" fo:margin-bottom="0.035cm" style:contextual-spacing="false"/>
      <style:text-properties officeooo:paragraph-rsid="01304d2b"/>
    </style:style>
    <style:style style:name="P140" style:family="paragraph" style:parent-style-name="Standard">
      <style:paragraph-properties fo:margin-top="0.212cm" fo:margin-bottom="0cm" style:contextual-spacing="false"/>
      <style:text-properties officeooo:paragraph-rsid="01304d2b"/>
    </style:style>
    <style:style style:name="T1" style:family="text">
      <style:text-properties fo:color="#7f8c8d" loext:opacity="100%" fo:font-size="9pt" style:font-size-asian="9pt" style:font-size-complex="9pt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d740" loext:char-shading-value="0" style:font-weight-asian="bold" style:font-weight-complex="bold"/>
    </style:style>
    <style:style style:name="T4" style:family="text">
      <style:text-properties fo:font-weight="bold" fo:background-color="#c6ff00" loext:char-shading-value="0" style:font-weight-asian="bold" style:font-weight-complex="bold"/>
    </style:style>
    <style:style style:name="T5" style:family="text">
      <style:text-properties fo:font-weight="bold" fo:background-color="#ff4081" loext:char-shading-value="0" style:font-weight-asian="bold" style:font-weight-complex="bold"/>
    </style:style>
    <style:style style:name="T6" style:family="text">
      <style:text-properties fo:font-weight="bold" fo:background-color="#64ffda" loext:char-shading-value="0" style:font-weight-asian="bold" style:font-weight-complex="bold"/>
    </style:style>
    <style:style style:name="T7" style:family="text">
      <style:text-properties fo:color="#76ff03" loext:opacity="100%"/>
    </style:style>
    <style:style style:name="T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10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12" style:family="text">
      <style:text-properties fo:color="#76ff03" loext:opacity="100%" fo:font-weight="bold" fo:background-color="#4e342e" loext:char-shading-value="0" style:font-weight-asian="bold" style:font-weight-complex="bold"/>
    </style:style>
    <style:style style:name="T13" style:family="text">
      <style:text-properties fo:color="#76ff03" loext:opacity="100%" fo:background-color="#f50057" loext:char-shading-value="0"/>
    </style:style>
    <style:style style:name="T14" style:family="text">
      <style:text-properties fo:color="#76ff03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15" style:family="text">
      <style:text-properties fo:color="#76ff03" loext:opacity="100%" fo:background-color="#5d4037" loext:char-shading-value="0"/>
    </style:style>
    <style:style style:name="T16" style:family="text">
      <style:text-properties fo:color="#76ff03" loext:opacity="100%" fo:background-color="#5d4037" loext:char-shading-value="0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20" style:family="text">
      <style:text-properties fo:color="#18ffff" loext:opacity="100%" fo:font-size="11pt" fo:font-weight="bold" fo:background-color="#d500f9" loext:char-shading-value="0" style:font-size-asian="11pt" style:font-weight-asian="bold" style:font-size-complex="11pt" style:font-weight-complex="bold"/>
    </style:style>
    <style:style style:name="T21" style:family="text">
      <style:text-properties fo:color="#18ffff" loext:opacity="100%" style:font-name="Arial" fo:font-size="10pt" fo:font-weight="bold" fo:background-color="#d500f9" loext:char-shading-value="0" style:font-name-asian="Arial3" style:font-size-asian="10pt" style:font-weight-asian="bold" style:font-name-complex="Arial3" style:font-size-complex="10pt" style:font-weight-complex="bold"/>
    </style:style>
    <style:style style:name="T22" style:family="text">
      <style:text-properties fo:color="#18ffff" loext:opacity="100%" style:font-name="Arial" fo:font-size="14pt" fo:font-weight="bold" fo:background-color="#d500f9" loext:char-shading-value="0" style:font-name-asian="Arial3" style:font-size-asian="14pt" style:font-weight-asian="bold" style:font-name-complex="Arial3" style:font-size-complex="14pt" style:font-weight-complex="bold"/>
    </style:style>
    <style:style style:name="T23" style:family="text">
      <style:text-properties fo:color="#18ffff" loext:opacity="100%" fo:background-color="#d500f9" loext:char-shading-value="0"/>
    </style:style>
    <style:style style:name="T24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25" style:family="text">
      <style:text-properties fo:color="#c0392b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26" style:family="text">
      <style:text-properties fo:color="#c0392b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7" style:family="text">
      <style:text-properties fo:color="#c0392b" loext:opacity="100%" style:font-name="Arial" fo:font-size="11pt" fo:font-weight="bold" fo:background-color="#ffff00" loext:char-shading-value="0" style:font-name-asian="Arial3" style:font-size-asian="11pt" style:font-weight-asian="bold" style:font-name-complex="Arial3" style:font-size-complex="11pt" style:font-weight-complex="bold"/>
    </style:style>
    <style:style style:name="T28" style:family="text">
      <style:text-properties fo:color="#1a1a1a" loext:opacity="100%" fo:font-size="11pt" style:font-size-asian="11pt" style:font-size-complex="11pt"/>
    </style:style>
    <style:style style:name="T29" style:family="text">
      <style:text-properties fo:color="#1a1a1a" loext:opacity="100%" fo:font-size="11pt" style:font-size-asian="11pt" style:font-size-complex="11pt"/>
    </style:style>
    <style:style style:name="T30" style:family="text">
      <style:text-properties fo:color="#1a1a1a" loext:opacity="100%" fo:font-size="11pt" fo:background-color="#ffff00" loext:char-shading-value="0" style:font-size-asian="11pt" style:font-size-complex="11pt"/>
    </style:style>
    <style:style style:name="T31" style:family="text">
      <style:text-properties fo:color="#1a1a1a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32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33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34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5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6" style:family="text">
      <style:text-properties fo:color="#ff3d00" loext:opacity="100%" fo:font-size="11pt" fo:font-weight="bold" fo:background-color="#64ffda" loext:char-shading-value="0" style:font-size-asian="11pt" style:font-weight-asian="bold" style:font-size-complex="11pt" style:font-weight-complex="bold"/>
    </style:style>
    <style:style style:name="T37" style:family="text">
      <style:text-properties fo:color="#ff3d00" loext:opacity="100%" style:font-name="Arial" fo:font-size="10pt" fo:font-weight="bold" fo:background-color="#64ffda" loext:char-shading-value="0" style:font-name-asian="Arial3" style:font-size-asian="10pt" style:font-weight-asian="bold" style:font-name-complex="Arial3" style:font-size-complex="10pt" style:font-weight-complex="bold"/>
    </style:style>
    <style:style style:name="T38" style:family="text">
      <style:text-properties fo:color="#ff3d00" loext:opacity="100%" fo:background-color="#64ffda" loext:char-shading-value="0"/>
    </style:style>
    <style:style style:name="T39" style:family="text">
      <style:text-properties fo:color="#ff3d00" loext:opacity="100%" fo:background-color="#64ffda" loext:char-shading-value="0"/>
    </style:style>
    <style:style style:name="T40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41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43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44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5" style:family="text">
      <style:text-properties fo:color="#ffd740" loext:opacity="100%" style:font-name="Arial" fo:font-size="10pt" fo:font-weight="bold" fo:background-color="#000000" loext:char-shading-value="0" style:font-name-asian="Arial3" style:font-size-asian="10pt" style:font-weight-asian="bold" style:font-name-complex="Arial3" style:font-size-complex="10pt" style:font-weight-complex="bold"/>
    </style:style>
    <style:style style:name="T46" style:family="text">
      <style:text-properties fo:color="#ffd740" loext:opacity="100%" style:font-name="Arial" fo:font-size="11pt" fo:font-weight="bold" fo:background-color="#3d5afe" loext:char-shading-value="0" style:font-name-asian="Arial3" style:font-size-asian="11pt" style:font-weight-asian="bold" style:font-name-complex="Arial3" style:font-size-complex="11pt" style:font-weight-complex="bold"/>
    </style:style>
    <style:style style:name="T47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48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49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50" style:family="text">
      <style:text-properties fo:color="#c6ff00" loext:opacity="100%" fo:background-color="#f50057" loext:char-shading-value="0"/>
    </style:style>
    <style:style style:name="T51" style:family="text">
      <style:text-properties fo:color="#c6ff00" loext:opacity="100%" style:font-name="Arial" fo:font-size="10pt" fo:font-weight="bold" fo:background-color="#f50057" loext:char-shading-value="0" style:font-name-asian="Arial3" style:font-size-asian="10pt" style:font-weight-asian="bold" style:font-name-complex="Arial3" style:font-size-complex="10pt" style:font-weight-complex="bold"/>
    </style:style>
    <style:style style:name="T52" style:family="text">
      <style:text-properties fo:color="#c6ff00" loext:opacity="100%" style:font-name="Arial" fo:font-size="14pt" fo:font-weight="bold" fo:background-color="#f50057" loext:char-shading-value="0" style:font-name-asian="Arial3" style:font-size-asian="14pt" style:font-weight-asian="bold" style:font-name-complex="Arial3" style:font-size-complex="14pt" style:font-weight-complex="bold"/>
    </style:style>
    <style:style style:name="T53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54" style:family="text">
      <style:text-properties fo:color="#1f3864" loext:opacity="100%" fo:font-size="11pt" fo:font-weight="bold" style:font-size-asian="11pt" style:font-weight-asian="bold" style:font-size-complex="11pt" style:font-weight-complex="bold"/>
    </style:style>
    <style:style style:name="T55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56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57" style:family="text">
      <style:text-properties fo:color="#ffff00" loext:opacity="100%"/>
    </style:style>
    <style:style style:name="T58" style:family="text">
      <style:text-properties fo:color="#ffff00" loext:opacity="100%" fo:font-size="11pt" fo:font-weight="bold" fo:background-color="#000000" loext:char-shading-value="0" style:font-size-asian="11pt" style:font-weight-asian="bold" style:font-size-complex="11pt" style:font-weight-complex="bold"/>
    </style:style>
    <style:style style:name="T59" style:family="text">
      <style:text-properties fo:color="#ffff00" loext:opacity="100%" fo:font-size="11pt" fo:font-weight="bold" fo:background-color="#ff9100" loext:char-shading-value="0" style:font-size-asian="11pt" style:font-weight-asian="bold" style:font-size-complex="11pt" style:font-weight-complex="bold"/>
    </style:style>
    <style:style style:name="T6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61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62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63" style:family="text">
      <style:text-properties fo:color="#ffff00" loext:opacity="100%" style:font-name="Arial" fo:font-size="10pt" fo:font-weight="bold" fo:background-color="#3d5afe" loext:char-shading-value="0" style:font-name-asian="Arial3" style:font-size-asian="10pt" style:font-weight-asian="bold" style:font-name-complex="Arial3" style:font-size-complex="10pt" style:font-weight-complex="bold"/>
    </style:style>
    <style:style style:name="T64" style:family="text">
      <style:text-properties fo:background-color="#ffff00" loext:char-shading-value="0"/>
    </style:style>
    <style:style style:name="T65" style:family="text">
      <style:text-properties fo:color="#64ffda" loext:opacity="100%" fo:font-weight="bold" fo:background-color="#d500f9" loext:char-shading-value="0" style:font-weight-asian="bold" style:font-weight-complex="bold"/>
    </style:style>
    <style:style style:name="T66" style:family="text">
      <style:text-properties fo:background-color="#ffd740" loext:char-shading-value="0"/>
    </style:style>
    <style:style style:name="T67" style:family="text">
      <style:text-properties fo:color="#55555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68" style:family="text">
      <style:text-properties fo:color="#555555" loext:opacity="100%" style:font-name="Arial" fo:font-size="10pt" fo:font-weight="normal" fo:background-color="#ffff00" loext:char-shading-value="0" style:font-name-asian="Arial3" style:font-size-asian="10pt" style:font-weight-asian="normal" style:font-name-complex="Arial3" style:font-size-complex="10pt" style:font-weight-complex="normal"/>
    </style:style>
    <style:style style:name="T69" style:family="text">
      <style:text-properties fo:color="#555555" loext:opacity="100%" style:font-name="Arial" fo:font-size="10pt" fo:font-weight="bold" fo:background-color="#ffff00" loext:char-shading-value="0" style:font-name-asian="Arial3" style:font-size-asian="10pt" style:font-weight-asian="bold" style:font-name-complex="Arial3" style:font-size-complex="10pt" style:font-weight-complex="bold"/>
    </style:style>
    <style:style style:name="T70" style:family="text">
      <style:text-properties fo:color="#555555" loext:opacity="100%" style:font-name="Arial" fo:font-size="10pt" fo:font-weight="bold" fo:background-color="#76ff03" loext:char-shading-value="0" style:font-name-asian="Arial3" style:font-size-asian="10pt" style:font-weight-asian="bold" style:font-name-complex="Arial3" style:font-size-complex="10pt" style:font-weight-complex="bold"/>
    </style:style>
    <style:style style:name="T71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72" style:family="text">
      <style:text-properties fo:color="#555555" loext:opacity="100%" style:font-name="Arial" fo:font-size="11pt" fo:font-weight="normal" style:font-name-asian="Arial3" style:font-size-asian="11pt" style:font-weight-asian="normal" style:font-name-complex="Arial3" style:font-size-complex="11pt" style:font-weight-complex="normal"/>
    </style:style>
    <style:style style:name="T73" style:family="text">
      <style:text-properties fo:color="#69f0ae" loext:opacity="100%" style:font-name="Arial" fo:font-size="10pt" fo:font-weight="bold" fo:background-color="#5d4037" loext:char-shading-value="0" style:font-name-asian="Arial3" style:font-size-asian="10pt" style:font-weight-asian="bold" style:font-name-complex="Arial3" style:font-size-complex="10pt" style:font-weight-complex="bold"/>
    </style:style>
    <style:style style:name="T74" style:family="text">
      <style:text-properties fo:color="#000000" loext:opacity="100%" style:font-name="Arial" fo:font-size="10pt" fo:background-color="#ffd740" loext:char-shading-value="0" style:font-name-asian="Arial3" style:font-size-asian="10pt" style:font-name-complex="Arial3" style:font-size-complex="10pt"/>
    </style:style>
    <style:style style:name="T75" style:family="text">
      <style:text-properties fo:color="#1f5c99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76" style:family="text">
      <style:text-properties fo:color="#1f5c99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77" style:family="text">
      <style:text-properties fo:color="#0d737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78" style:family="text">
      <style:text-properties fo:color="#0d7377" loext:opacity="100%" style:font-name="Arial" fo:font-size="14pt" fo:font-weight="bold" fo:background-color="#ffd740" loext:char-shading-value="0" style:font-name-asian="Arial3" style:font-size-asian="14pt" style:font-weight-asian="bold" style:font-name-complex="Arial3" style:font-size-complex="14pt" style:font-weight-complex="bold"/>
    </style:style>
    <style:style style:name="T79" style:family="text">
      <style:text-properties fo:color="#0d737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80" style:family="text">
      <style:text-properties fo:color="#ffab40" loext:opacity="100%" fo:font-weight="bold" fo:background-color="#3d5afe" loext:char-shading-value="0" style:font-weight-asian="bold" style:font-weight-complex="bold"/>
    </style:style>
    <style:style style:name="T81" style:family="text">
      <style:text-properties fo:background-color="#ffab40" loext:char-shading-value="0"/>
    </style:style>
    <style:style style:name="T82" style:family="text">
      <style:text-properties fo:color="#ff9100" loext:opacity="100%" fo:font-weight="bold" fo:background-color="#ffff00" loext:char-shading-value="0" style:font-weight-asian="bold" style:font-weight-complex="bold"/>
    </style:style>
    <style:style style:name="T83" style:family="text">
      <style:text-properties fo:color="#40c4ff" loext:opacity="100%" fo:font-weight="bold" fo:background-color="#000000" loext:char-shading-value="0" style:font-weight-asian="bold" style:font-weight-complex="bold"/>
    </style:style>
    <style:style style:name="T84" style:family="text">
      <style:text-properties fo:color="#b2ff59" loext:opacity="100%" fo:font-weight="bold" fo:background-color="#f50057" loext:char-shading-value="0" style:font-weight-asian="bold" style:font-weight-complex="bold"/>
    </style:style>
    <style:style style:name="T85" style:family="text">
      <style:text-properties fo:background-color="#18ffff" loext:char-shading-value="0"/>
    </style:style>
    <style:style style:name="T86" style:family="text">
      <style:text-properties fo:background-color="#ffc400" loext:char-shading-value="0"/>
    </style:style>
    <style:style style:name="T87" style:family="text">
      <style:text-properties fo:color="#eeeeee" loext:opacity="100%" fo:font-weight="bold" fo:background-color="#ff5252" loext:char-shading-value="0" style:font-weight-asian="bold" style:font-weight-complex="bold"/>
    </style:style>
    <style:style style:name="T88" style:family="text">
      <style:text-properties fo:background-color="#eeff41" loext:char-shading-value="0"/>
    </style:style>
    <style:style style:name="T89" style:family="text">
      <style:text-properties fo:background-color="#c6ff00" loext:char-shading-value="0"/>
    </style:style>
    <style:style style:name="T90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91" style:family="text">
      <style:text-properties fo:background-color="#64ffda" loext:char-shading-value="0"/>
    </style:style>
    <style:style style:name="T92" style:family="text">
      <style:text-properties fo:background-color="#64ffda" loext:char-shading-value="0"/>
    </style:style>
    <style:style style:name="T93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94" style:family="text"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95" style:family="text"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96" style:family="text"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97" style:family="text">
      <style:text-properties fo:color="#1abc9c" loext:opacity="100%"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B-Tree + 2-3 Tree + 2-3-4 Tree</text:p>
      <text:p text:style-name="P7">Red-Black Tree 完整對照筆記</text:p>
      <text:p text:style-name="P10">公職考試｜資料結構專用</text:p>
      <text:p text:style-name="P11">高考・地特・關務 重點整理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2">本筆記涵蓋考點</text:p>
            <text:p text:style-name="P13">111地Q3 <text:s/>· <text:s/>112高Q4 <text:s/>· <text:s/>113地Q4 <text:s/>· <text:s/>114高Q1</text:p>
            <text:p text:style-name="P21">m-way Search Tree <text:s/>· <text:s/>B-Tree <text:s/>· <text:s/>2-3 Tree <text:s/>· <text:s/>2-3-4 Tree <text:s/>· <text:s/>RB Tree</text:p>
          </table:table-cell>
        </table:table-row>
      </table:table>
      <text:p text:style-name="Standard"/>
      <text:h text:style-name="P14" text:outline-level="1">第一章　為什麼需要這些樹？BST 的問題</text:h>
      <text:h text:style-name="P15" text:outline-level="2">1.1 普通 BST 的致命缺陷</text:h>
      <text:p text:style-name="P25"><text:span text:style-name="T2">如果依序插入</text:span>：10, 20, 30, 40, 50，BST 會變成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32"><text:s text:c="2"/>10</text:p>
            <text:p text:style-name="P32"><text:s text:c="4"/>\</text:p>
            <text:p text:style-name="P32"><text:s text:c="5"/>20</text:p>
            <text:p text:style-name="P32"><text:s text:c="7"/>\</text:p>
            <text:p text:style-name="P32"><text:s text:c="8"/>30</text:p>
            <text:p text:style-name="P32"><text:s text:c="10"/>\</text:p>
            <text:p text:style-name="P32"><text:s text:c="11"/>40</text:p>
            <text:p text:style-name="P32"><text:s text:c="13"/>\</text:p>
            <text:p text:style-name="P32"><text:s text:c="14"/>50</text:p>
          </table:table-cell>
        </table:table-row>
      </table:table>
      <text:p text:style-name="P25">這種情況稱為「<text:span text:style-name="T8">退化樹（Degenerate Tree）</text:span>」，搜尋時間複雜度退化為 O(n)，與 Linked List 無異。</text:p>
      <text:p text:style-name="P45"><text:s/></text:p>
      <text:h text:style-name="P15" text:outline-level="2">1.2 各種平衡樹的演進關係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8">樹的種類</text:p>
          </table:table-cell>
          <table:table-cell table:style-name="表格3.A1" office:value-type="string">
            <text:p text:style-name="P18">維持平衡的方式</text:p>
          </table:table-cell>
          <table:table-cell table:style-name="表格3.A1" office:value-type="string">
            <text:p text:style-name="P18">搜尋效率</text:p>
          </table:table-cell>
          <table:table-cell table:style-name="表格3.A1" office:value-type="string">
            <text:p text:style-name="P18">實務應用</text:p>
          </table:table-cell>
        </table:table-row>
        <table:table-row table:style-name="表格3.1">
          <table:table-cell table:style-name="表格3.A2" office:value-type="string">
            <text:p text:style-name="P33">BST</text:p>
          </table:table-cell>
          <table:table-cell table:style-name="表格3.A2" office:value-type="string">
            <text:p text:style-name="P33">不自動平衡</text:p>
          </table:table-cell>
          <table:table-cell table:style-name="表格3.A2" office:value-type="string">
            <text:p text:style-name="P33"><text:span text:style-name="T2">O(n)</text:span> <text:span text:style-name="T17">最壞</text:span></text:p>
          </table:table-cell>
          <table:table-cell table:style-name="表格3.A2" office:value-type="string">
            <text:p text:style-name="P33">基礎概念</text:p>
          </table:table-cell>
        </table:table-row>
        <table:table-row table:style-name="表格3.1">
          <table:table-cell table:style-name="表格3.A3" office:value-type="string">
            <text:p text:style-name="P33">AVL Tree</text:p>
          </table:table-cell>
          <table:table-cell table:style-name="表格3.A3" office:value-type="string">
            <text:p text:style-name="P33">旋轉 (LL/RR/LR/RL)</text:p>
          </table:table-cell>
          <table:table-cell table:style-name="表格3.A3" office:value-type="string">
            <text:p text:style-name="P33">O(<text:span text:style-name="T2">log n</text:span>)</text:p>
          </table:table-cell>
          <table:table-cell table:style-name="表格3.A3" office:value-type="string">
            <text:p text:style-name="P33">教學用途</text:p>
          </table:table-cell>
        </table:table-row>
        <table:table-row table:style-name="表格3.1">
          <table:table-cell table:style-name="表格3.A2" office:value-type="string">
            <text:p text:style-name="P33">2-3 Tree</text:p>
          </table:table-cell>
          <table:table-cell table:style-name="表格3.A2" office:value-type="string">
            <text:p text:style-name="P33">Split / Borrow / Merge</text:p>
          </table:table-cell>
          <table:table-cell table:style-name="表格3.A2" office:value-type="string">
            <text:p text:style-name="P33">O(<text:span text:style-name="T2">log n</text:span>)</text:p>
          </table:table-cell>
          <table:table-cell table:style-name="表格3.A2" office:value-type="string">
            <text:p text:style-name="P33">B-Tree 基礎</text:p>
          </table:table-cell>
        </table:table-row>
        <table:table-row table:style-name="表格3.1">
          <table:table-cell table:style-name="表格3.A3" office:value-type="string">
            <text:p text:style-name="P33">2-3-4 Tree</text:p>
          </table:table-cell>
          <table:table-cell table:style-name="表格3.A3" office:value-type="string">
            <text:p text:style-name="P33">Split / Borrow / Merge</text:p>
          </table:table-cell>
          <table:table-cell table:style-name="表格3.A3" office:value-type="string">
            <text:p text:style-name="P33">O(<text:span text:style-name="T2">log n</text:span>)</text:p>
          </table:table-cell>
          <table:table-cell table:style-name="表格3.A3" office:value-type="string">
            <text:p text:style-name="P33">= B-Tree order 4</text:p>
          </table:table-cell>
        </table:table-row>
        <table:table-row table:style-name="表格3.1">
          <table:table-cell table:style-name="表格3.A2" office:value-type="string">
            <text:p text:style-name="P33">B-Tree (order m)</text:p>
          </table:table-cell>
          <table:table-cell table:style-name="表格3.A2" office:value-type="string">
            <text:p text:style-name="P33">Split / Borrow / Merge</text:p>
          </table:table-cell>
          <table:table-cell table:style-name="表格3.A2" office:value-type="string">
            <text:p text:style-name="P33">O(<text:span text:style-name="T2">log n</text:span>)</text:p>
          </table:table-cell>
          <table:table-cell table:style-name="表格3.A2" office:value-type="string">
            <text:p text:style-name="P33">資料庫索引</text:p>
          </table:table-cell>
        </table:table-row>
        <table:table-row table:style-name="表格3.1">
          <table:table-cell table:style-name="表格3.A3" office:value-type="string">
            <text:p text:style-name="P33">Red-Black Tree</text:p>
          </table:table-cell>
          <table:table-cell table:style-name="表格3.A3" office:value-type="string">
            <text:p text:style-name="P33">顏色標記 + 旋轉</text:p>
          </table:table-cell>
          <table:table-cell table:style-name="表格3.A3" office:value-type="string">
            <text:p text:style-name="P33">O(<text:span text:style-name="T2">log n</text:span>)</text:p>
          </table:table-cell>
          <table:table-cell table:style-name="表格3.A3" office:value-type="string">
            <text:p text:style-name="P33">Linux Kernel, Java, C++</text:p>
          </table:table-cell>
        </table:table-row>
      </table:table>
      <text:p text:style-name="P46"><text:s/></text:p>
      <text:p text:style-name="P47"><text:span text:style-name="T24">核心記憶句：</text:span><text:span text:style-name="T28">AVL 靠「旋轉」維持平衡；2-3 Tree / B-Tree 靠「分裂(Split)與合併(Merge)」維持平衡。這一句幾乎就是整章樹狀結構的核心。</text:span></text:p>
      <text:p text:style-name="Standard"/>
      <text:h text:style-name="P14" text:outline-level="1">第二章　m-way 搜尋樹定義</text:h>
      <text:h text:style-name="P15" text:outline-level="2">2.1 基本概念</text:h>
      <text:p text:style-name="P25"><text:span text:style-name="T2">普通 BST </text:span>是<text:span text:style-name="T34"> 2-way</text:span> 搜尋樹（<text:span text:style-name="T40">每個節點最多 2 個子樹</text:span>）。m-way 搜尋樹允許每個節點有更多子樹：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18">樹的類型</text:p>
          </table:table-cell>
          <table:table-cell table:style-name="表格4.A1" office:value-type="string">
            <text:p text:style-name="P18">每節點最多 children</text:p>
          </table:table-cell>
          <table:table-cell table:style-name="表格4.A1" office:value-type="string">
            <text:p text:style-name="P18">每節點最多 key</text:p>
          </table:table-cell>
        </table:table-row>
        <table:table-row table:style-name="表格4.1">
          <table:table-cell table:style-name="表格4.A2" office:value-type="string">
            <text:p text:style-name="P33">BST（2-way）</text:p>
          </table:table-cell>
          <table:table-cell table:style-name="表格4.A2" office:value-type="string">
            <text:p text:style-name="P33">2 個</text:p>
          </table:table-cell>
          <table:table-cell table:style-name="表格4.A2" office:value-type="string">
            <text:p text:style-name="P33">1 個</text:p>
          </table:table-cell>
        </table:table-row>
        <table:table-row table:style-name="表格4.1">
          <table:table-cell table:style-name="表格4.A3" office:value-type="string">
            <text:p text:style-name="P33">2-3 Tree</text:p>
          </table:table-cell>
          <table:table-cell table:style-name="表格4.A3" office:value-type="string">
            <text:p text:style-name="P33">3 個</text:p>
          </table:table-cell>
          <table:table-cell table:style-name="表格4.A3" office:value-type="string">
            <text:p text:style-name="P33">2 個</text:p>
          </table:table-cell>
        </table:table-row>
        <table:table-row table:style-name="表格4.1">
          <table:table-cell table:style-name="表格4.A2" office:value-type="string">
            <text:p text:style-name="P33">2-3-4 Tree</text:p>
          </table:table-cell>
          <table:table-cell table:style-name="表格4.A2" office:value-type="string">
            <text:p text:style-name="P33">4 個</text:p>
          </table:table-cell>
          <table:table-cell table:style-name="表格4.A2" office:value-type="string">
            <text:p text:style-name="P33">3 個</text:p>
          </table:table-cell>
        </table:table-row>
        <table:table-row table:style-name="表格4.1">
          <table:table-cell table:style-name="表格4.A3" office:value-type="string">
            <text:p text:style-name="P33">B-Tree (order m)</text:p>
          </table:table-cell>
          <table:table-cell table:style-name="表格4.A3" office:value-type="string">
            <text:p text:style-name="P33">m 個</text:p>
          </table:table-cell>
          <table:table-cell table:style-name="表格4.A3" office:value-type="string">
            <text:p text:style-name="P33">m-1 個</text:p>
          </table:table-cell>
        </table:table-row>
      </table:table>
      <text:p text:style-name="P48"><text:s/></text:p>
      <text:h text:style-name="P15" text:outline-level="2">2.2 超白話記憶法：只需要記一句話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2">核心公式（整章只需記這一句）</text:p>
            <text:p text:style-name="P49">children = key + 1</text:p>
            <text:p text:style-name="P53"/>
            <text:p text:style-name="P26">因為<text:span text:style-name="T10">一個 key </text:span>會把空間切成<text:span text:style-name="T10">左右兩塊</text:span>；<text:span text:style-name="T10">兩個 key 切三塊</text:span>；以此類推。</text:p>
          </table:table-cell>
        </table:table-row>
      </table:table>
      <text:p text:style-name="P45"><text:s/></text:p>
      <text:p text:style-name="P25">用圖來理解為什麼 children = key + 1：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32">1 個 key： <text:s/>[50]</text:p>
            <text:p text:style-name="P32"><text:s text:c="14"/>↓</text:p>
            <text:p text:style-name="P32"><text:s text:c="10"/>&lt;50 <text:s text:c="3"/>&gt;50</text:p>
            <text:p text:style-name="P32"><text:s text:c="10"/>(左) <text:s text:c="2"/>(右) <text:s text:c="2"/>→ 2 個出口 = 2 個 children</text:p>
            <text:p text:style-name="P54"/>
            <text:p text:style-name="P32">2 個 key： <text:s/>[20 | 50]</text:p>
            <text:p text:style-name="P32"><text:s text:c="17"/>↓</text:p>
            <text:p text:style-name="P32"><text:s text:c="7"/>&lt;20 <text:s text:c="2"/>20~50 <text:s text:c="2"/>&gt;50</text:p>
            <text:p text:style-name="P32"><text:s text:c="7"/>(左) <text:s text:c="2"/>(中) <text:s text:c="2"/>(右) <text:s/>→ 3 個出口 = 3 個 children</text:p>
            <text:p text:style-name="P54"/>
            <text:p text:style-name="P32">3 個 key： <text:s/>[20 | 50 | 80]</text:p>
            <text:p text:style-name="P32"><text:s text:c="20"/>↓</text:p>
            <text:p text:style-name="P32"><text:s text:c="3"/>&lt;20 <text:s/>20~50 <text:s/>50~80 <text:s/>&gt;80</text:p>
            <text:p text:style-name="P32"><text:s text:c="3"/>(1) <text:s text:c="2"/>(2) <text:s text:c="2"/>(3) <text:s text:c="2"/>(4) <text:s/>→ 4 個出口 = 4 個 children</text:p>
          </table:table-cell>
        </table:table-row>
      </table:table>
      <text:p text:style-name="P45"><text:s/></text:p>
      <text:p text:style-name="P25">所以整張比較表，其實只是同一條公式的重複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/>
        <table:table-row table:style-name="表格7.1">
          <table:table-cell table:style-name="表格7.A1" office:value-type="string">
            <text:p text:style-name="P18">樹的名稱</text:p>
          </table:table-cell>
          <table:table-cell table:style-name="表格7.A1" office:value-type="string">
            <text:p text:style-name="P18">直覺理解</text:p>
          </table:table-cell>
          <table:table-cell table:style-name="表格7.A1" office:value-type="string">
            <text:p text:style-name="P18">children（出口數）</text:p>
          </table:table-cell>
          <table:table-cell table:style-name="表格7.A1" office:value-type="string">
            <text:p text:style-name="P18">key（格子數）</text:p>
          </table:table-cell>
        </table:table-row>
        <table:table-row table:style-name="表格7.1">
          <table:table-cell table:style-name="表格7.A2" office:value-type="string">
            <text:p text:style-name="P33">BST</text:p>
          </table:table-cell>
          <table:table-cell table:style-name="表格7.A2" office:value-type="string">
            <text:p text:style-name="P33">最多 2 個出口</text:p>
          </table:table-cell>
          <table:table-cell table:style-name="表格7.A2" office:value-type="string">
            <text:p text:style-name="P33">2</text:p>
          </table:table-cell>
          <table:table-cell table:style-name="表格7.A2" office:value-type="string">
            <text:p text:style-name="P33">1</text:p>
          </table:table-cell>
        </table:table-row>
        <table:table-row table:style-name="表格7.1">
          <table:table-cell table:style-name="表格7.A3" office:value-type="string">
            <text:p text:style-name="P33">2-3 Tree</text:p>
          </table:table-cell>
          <table:table-cell table:style-name="表格7.A3" office:value-type="string">
            <text:p text:style-name="P33">最多 3 個出口</text:p>
          </table:table-cell>
          <table:table-cell table:style-name="表格7.A3" office:value-type="string">
            <text:p text:style-name="P33">3</text:p>
          </table:table-cell>
          <table:table-cell table:style-name="表格7.A3" office:value-type="string">
            <text:p text:style-name="P33">2</text:p>
          </table:table-cell>
        </table:table-row>
        <table:table-row table:style-name="表格7.1">
          <table:table-cell table:style-name="表格7.A2" office:value-type="string">
            <text:p text:style-name="P33">2-3-4 Tree</text:p>
          </table:table-cell>
          <table:table-cell table:style-name="表格7.A2" office:value-type="string">
            <text:p text:style-name="P33">最多 4 個出口</text:p>
          </table:table-cell>
          <table:table-cell table:style-name="表格7.A2" office:value-type="string">
            <text:p text:style-name="P33">4</text:p>
          </table:table-cell>
          <table:table-cell table:style-name="表格7.A2" office:value-type="string">
            <text:p text:style-name="P33">3</text:p>
          </table:table-cell>
        </table:table-row>
        <table:table-row table:style-name="表格7.1">
          <table:table-cell table:style-name="表格7.A3" office:value-type="string">
            <text:p text:style-name="P33">B-Tree (order m)</text:p>
          </table:table-cell>
          <table:table-cell table:style-name="表格7.A3" office:value-type="string">
            <text:p text:style-name="P33">最多 m 個出口</text:p>
          </table:table-cell>
          <table:table-cell table:style-name="表格7.A3" office:value-type="string">
            <text:p text:style-name="P33">m</text:p>
          </table:table-cell>
          <table:table-cell table:style-name="表格7.A3" office:value-type="string">
            <text:p text:style-name="P33">m-1</text:p>
          </table:table-cell>
        </table:table-row>
      </table:table>
      <text:p text:style-name="P45"><text:soft-page-break/><text:s/></text:p>
      <text:p text:style-name="P47"><text:span text:style-name="T41">m-way 的白話翻譯：</text:span><text:span text:style-name="T28"> 老師說『m-way search tree』，腦袋直接換成『最多 m 個出口的搜尋樹』就好，完全不需要記新名詞。</text:span></text:p>
      <text:p text:style-name="P45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55">考試暴力記憶法（只背這三行，其餘全部可以推導）</text:p>
            <text:p text:style-name="P26">2-3 Tree <text:s text:c="2"/>→ 3 個出口 → 最多 2 個 key</text:p>
            <text:p text:style-name="P26">2-3-4 Tree → 4 個出口 → 最多 3 個 key</text:p>
            <text:p text:style-name="P26">B-Tree order m → m 個出口 → 最多 m-1 個 key</text:p>
            <text:p text:style-name="P53"/>
            <text:p text:style-name="P26">其他名詞（m-way、degree、order）全部都是這三行的不同說法而已。</text:p>
          </table:table-cell>
        </table:table-row>
      </table:table>
      <text:p text:style-name="P48"><text:s/></text:p>
      <text:h text:style-name="P15" text:outline-level="2">2.3 節點結構說明</text:h>
      <text:p text:style-name="P25">一個<text:span text:style-name="T3"> degree=m</text:span> 的 <text:span text:style-name="T11">m-way </text:span>節點結構如下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2">節點有：最多 <text:span text:style-name="T2">m-1</text:span> 個<text:span text:style-name="T17">資料（key）</text:span></text:p>
            <text:p text:style-name="P32"><text:s text:c="7"/>最多 <text:span text:style-name="T2">m</text:span> <text:s text:c="2"/>個<text:span text:style-name="T43">子樹（children）</text:span></text:p>
            <text:p text:style-name="P54"/>
            <text:p text:style-name="P32">關係式：<text:span text:style-name="T47">children 數 = key 數 + 1</text:span></text:p>
            <text:p text:style-name="P54"/>
            <text:p text:style-name="P32">例如 m=4：</text:p>
            <text:p text:style-name="P32"><text:s text:c="2"/>[20 | 50 | 80] <text:s text:c="3"/>← <text:span text:style-name="T2">3 個 key</text:span></text:p>
            <text:p text:style-name="P32"><text:s text:c="2"/>/ <text:s text:c="2"/>| <text:s text:c="3"/>| <text:s text:c="2"/>\ <text:s text:c="2"/>← <text:span text:style-name="T2">4 個 children</text:span></text:p>
            <text:p text:style-name="P32"><text:s/>c1 <text:s text:c="2"/>c2 <text:s text:c="2"/>c3 <text:s text:c="2"/>c4</text:p>
          </table:table-cell>
        </table:table-row>
      </table:table>
      <text:p text:style-name="P45"><text:s/></text:p>
      <text:h text:style-name="P16" text:outline-level="2">2.4 陣列表示法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56">⚠️ 考試重要度提示</text:p>
            <text:p text:style-name="P27">這一節在公職考試的重要度約 10 分，B-Tree 插入刪除才是 90 分的重點。</text:p>
            <text:p text:style-name="P27">看不懂不用恐慌，只需記最後兩行公式即可。</text:p>
          </table:table-cell>
        </table:table-row>
      </table:table>
      <text:p text:style-name="P58"><text:s/></text:p>
      <text:p text:style-name="P59"><text:span text:style-name="T53">概念：</text:span><text:span text:style-name="T28">樹狀結構通常需要 pointer（指標）才能連結節點。但</text:span><text:span text:style-name="T58">陣列表示法完全不用 pointer</text:span><text:span text:style-name="T28">，</text:span><text:span text:style-name="T36">靠「位置計算」就能找到任何子節點</text:span><text:span text:style-name="T28">，原理跟 Binary Heap 一模一樣。</text:span></text:p>
      <text:p text:style-name="P58"><text:s/></text:p>
      <text:h text:style-name="P5" text:outline-level="3">第一步：先從你熟悉的 Binary Heap 理解</text:h>
      <text:p text:style-name="P28">你以前看過 Heap 的陣列存法：</text:p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34"><text:s text:c="8"/>10</text:p>
            <text:p text:style-name="P34"><text:s text:c="7"/>/ <text:s/>\</text:p>
            <text:p text:style-name="P34"><text:s text:c="5"/>20 <text:s text:c="3"/>30</text:p>
            <text:p text:style-name="P60"/>
            <text:p text:style-name="P34"><text:s text:c="2"/>a[1]=10 <text:s/>（root）</text:p>
            <text:p text:style-name="P34"><text:s text:c="2"/>a[2]=20 <text:s/>（左孩子）</text:p>
            <text:p text:style-name="P60"><text:soft-page-break/><text:span text:style-name="T32"><text:s text:c="2"/>a[3]=30 <text:s/>（右孩子）</text:span></text:p>
            <text:p text:style-name="P60"/>
            <text:p text:style-name="P34"><text:s text:c="2"/><text:span text:style-name="T17">父節點在 a[i]</text:span> <text:s/>→ <text:span text:style-name="T60"><text:s/>左孩子 a[2i]，右孩子 a[2i+1]</text:span></text:p>
            <text:p text:style-name="P34"><text:s text:c="2"/>（<text:span text:style-name="T40">0-indexed 版本：左孩子 a[2i+1]，右孩子 a[2i+2]</text:span>）</text:p>
          </table:table-cell>
        </table:table-row>
      </table:table>
      <text:p text:style-name="P58"><text:s/></text:p>
      <text:h text:style-name="P5" text:outline-level="3">第二步：m-way Tree 只是把 2 換成 m</text:h>
      <text:p text:style-name="P28"><text:span text:style-name="T61">BST 每個節點最多 2 個孩子，所以用 2×i</text:span>。<text:span text:style-name="T47">m-way Tree 每個節點最多 m 個孩子</text:span>，所以改成<text:span text:style-name="T34"> m×i</text:span>，再加上<text:span text:style-name="T34">第幾個孩子 c</text:span>：</text:p>
      <table:table table:name="表格69" table:style-name="表格69">
        <table:table-column table:style-name="表格69.A"/>
        <table:table-row table:style-name="表格69.1">
          <table:table-cell table:style-name="表格69.A1" office:value-type="string">
            <text:p text:style-name="P34">公式：<text:span text:style-name="T3">第 c 個孩子 </text:span><text:s/>→ <text:s/><text:span text:style-name="T17">a[m×i + c]</text:span></text:p>
            <text:p text:style-name="P60"/>
            <text:p text:style-name="P34"><text:s text:c="2"/><text:span text:style-name="T3">i</text:span> = <text:span text:style-name="T62">該節點在陣列中的 index</text:span></text:p>
            <text:p text:style-name="P34"><text:s text:c="2"/><text:span text:style-name="T3">c</text:span> = <text:span text:style-name="T34">第幾個孩子</text:span>（從 1 開始數）</text:p>
            <text:p text:style-name="P34"><text:s text:c="2"/><text:span text:style-name="T3">m</text:span> = <text:span text:style-name="T47">這棵樹的 order</text:span>（2-3 Tree 就代 m=3，BST 就代 m=2）</text:p>
            <text:p text:style-name="P60"/>
            <text:p text:style-name="P34">代入 <text:span text:style-name="T64">m=2</text:span>（BST）：</text:p>
            <text:p text:style-name="P34"><text:s text:c="2"/><text:span text:style-name="T34">第 1 孩子</text:span> → a[<text:span text:style-name="T64">2</text:span>×i+<text:span text:style-name="T34">1</text:span>] <text:s/>← 和 Heap 的左孩子完全一樣！</text:p>
            <text:p text:style-name="P34"><text:s text:c="2"/><text:span text:style-name="T34">第 2 孩子</text:span> → a[<text:span text:style-name="T64">2</text:span>×i+<text:span text:style-name="T34">2]</text:span> <text:s/>← 和 Heap 的右孩子完全一樣！</text:p>
          </table:table-cell>
        </table:table-row>
      </table:table>
      <text:p text:style-name="P58"><text:s/></text:p>
      <text:h text:style-name="P5" text:outline-level="3">第三步：實際代數字算一遍</text:h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34">範例 A：2-3 Tree（<text:span text:style-name="T64">m=3</text:span>），節點在 a[<text:span text:style-name="T4">2</text:span>]</text:p>
            <text:p text:style-name="P34"><text:s text:c="2"/><text:span text:style-name="T34">第 1 孩子</text:span> → a[<text:span text:style-name="T64">3</text:span>×<text:span text:style-name="T4">2</text:span>+<text:span text:style-name="T34">1</text:span>] = a[7]</text:p>
            <text:p text:style-name="P34"><text:s text:c="2"/><text:span text:style-name="T34">第 2 孩子</text:span> → a[<text:span text:style-name="T64">3</text:span>×<text:span text:style-name="T4">2</text:span>+<text:span text:style-name="T34">2</text:span>] = a[8]</text:p>
            <text:p text:style-name="P34"><text:s text:c="2"/><text:span text:style-name="T34">第 3 孩子</text:span> → a[<text:span text:style-name="T64">3</text:span>×<text:span text:style-name="T4">2</text:span>+<text:span text:style-name="T34">3</text:span>] = a[9]</text:p>
            <text:p text:style-name="P60"/>
            <text:p text:style-name="P34">範例 B（考試常考型）：m=4，節點在 a[3]，第 2 孩子在哪？</text:p>
            <text:p text:style-name="P34"><text:s text:c="2"/>a[4×3+2] = a[14] <text:s text:c="2"/>← 答案就是 a[14]</text:p>
          </table:table-cell>
        </table:table-row>
      </table:table>
      <text:p text:style-name="P58"><text:s/></text:p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23">只需記這兩行，其餘全部推導</text:p>
            <text:p text:style-name="P27">root = a[0]</text:p>
            <text:p text:style-name="P27"><text:span text:style-name="T2">第 c 個孩子</text:span> =<text:span text:style-name="T17"> a[m×i + c]</text:span></text:p>
          </table:table-cell>
        </table:table-row>
      </table:table>
      <text:h text:style-name="P61" text:outline-level="2">2.5 搜尋順序規則</text:h>
      <text:p text:style-name="P25">以節點 [30 | 60] 為例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2"><text:s text:c="8"/>[30 | 60]</text:p>
            <text:p text:style-name="P32"><text:s text:c="7"/>/ <text:s text:c="3"/>| <text:s text:c="3"/>\</text:p>
            <text:p text:style-name="P32"><text:s text:c="6"/>/ <text:s text:c="4"/>| <text:s text:c="4"/>\</text:p>
            <text:p text:style-name="P32"><text:s/>(&lt;30) <text:s/>(30~60) <text:s/>(&gt;60)</text:p>
            <text:p text:style-name="P54"/>
            <text:p text:style-name="P32">左子樹：所有值 &lt; 30</text:p>
            <text:p text:style-name="P32">中子樹：30 &lt; 值 &lt; 60</text:p>
            <text:p text:style-name="P32">右子樹：所有值 &gt; 60</text:p>
          </table:table-cell>
        </table:table-row>
      </table:table>
      <text:p text:style-name="Standard"/>
      <text:h text:style-name="P14" text:outline-level="1">第三章　B-Tree 完整定義與重要公式</text:h>
      <text:h text:style-name="P15" text:outline-level="2">3.1 什麼是 B-Tree？</text:h>
      <text:p text:style-name="P25">B-Tree 是一種多路平衡搜尋樹，專為資料庫、檔案系統設計。<text:span text:style-name="T8">每個節點可存放多個 key</text:span>，使<text:span text:style-name="T60">樹的高度極低</text:span>，<text:span text:style-name="T2">大幅減少磁碟 I/O 次數</text:span>。</text:p>
      <text:p text:style-name="P45"><text:s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50">為什麼資料庫要用 B-Tree？</text:p>
            <text:p text:style-name="P26"><text:span text:style-name="T17">資料庫資料存在硬碟</text:span>，每次存取需要磁碟 I/O（很慢）。</text:p>
            <text:p text:style-name="P26"><text:span text:style-name="T34">AVL Tree 每個節點只存 1 個 key → 高度高</text:span> → I/O 次數多。</text:p>
            <text:p text:style-name="P26"><text:span text:style-name="T47">B-Tree order 100 每個節點可存 99 個 key → 100 萬筆資料高度僅約 3</text:span>。</text:p>
            <text:p text:style-name="P26">高度 3 → 最多只需 3 次磁碟 I/O，效率極高。</text:p>
          </table:table-cell>
        </table:table-row>
      </table:table>
      <text:p text:style-name="P48"><text:s/></text:p>
      <text:h text:style-name="P15" text:outline-level="2">3.2 B-Tree order 的定義（超重要！）</text:h>
      <text:p text:style-name="P47"><text:span text:style-name="T25">B-Tree order m</text:span><text:span text:style-name="T30"> </text:span><text:span text:style-name="T28">的意思是：</text:span><text:span text:style-name="T20">每個節點「最多有 m 個 children」</text:span><text:span text:style-name="T28">（</text:span><text:span text:style-name="T59">不是 m 個 key！</text:span><text:span text:style-name="T28">）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62">order = m <text:s/>→ <text:s/>最大 children 數 = m <text:s/>→ <text:s/>最大 key 數 = m-1</text:p>
            <text:p text:style-name="P54"/>
            <text:p text:style-name="P32">常見對照：</text:p>
            <text:p text:style-name="P32"><text:s text:c="2"/>order = <text:span text:style-name="T3">3</text:span> <text:s/>→ <text:s/>2-<text:span text:style-name="T3">3</text:span> Tree <text:s text:c="5"/>（最多 2 key，最多 <text:span text:style-name="T3">3 children</text:span>）</text:p>
            <text:p text:style-name="P32"><text:s text:c="2"/>order = <text:span text:style-name="T3">4</text:span> <text:s/>→ <text:s/>2-3-<text:span text:style-name="T3">4</text:span> Tree <text:s text:c="2"/>（最多 3 key，最多 <text:span text:style-name="T3">4 children</text:span>）</text:p>
            <text:p text:style-name="P32"><text:s text:c="2"/>order = <text:span text:style-name="T3">5</text:span> <text:s/>→ <text:s/>每節點最多 4 key，最多 <text:span text:style-name="T3">5 children</text:span></text:p>
          </table:table-cell>
        </table:table-row>
      </table:table>
      <text:p text:style-name="P45"><text:s/></text:p>
      <text:h text:style-name="P15" text:outline-level="2">3.3 B-Tree 完整性質</text:h>
      <table:table table:name="表格14" table:style-name="表格14">
        <table:table-column table:style-name="表格14.A" table:number-columns-repeated="2"/>
        <table:table-row table:style-name="表格14.1">
          <table:table-cell table:style-name="表格14.A1" office:value-type="string">
            <text:p text:style-name="P18">性質</text:p>
          </table:table-cell>
          <table:table-cell table:style-name="表格14.A1" office:value-type="string">
            <text:p text:style-name="P18">公式／說明</text:p>
          </table:table-cell>
        </table:table-row>
        <table:table-row table:style-name="表格14.1">
          <table:table-cell table:style-name="表格14.A2" office:value-type="string">
            <text:p text:style-name="P40">每節點最多 key 數</text:p>
          </table:table-cell>
          <table:table-cell table:style-name="表格14.A2" office:value-type="string">
            <text:p text:style-name="P41">m - 1</text:p>
          </table:table-cell>
        </table:table-row>
        <table:table-row table:style-name="表格14.1">
          <table:table-cell table:style-name="表格14.A3" office:value-type="string">
            <text:p text:style-name="P33">根節點最少 key 數</text:p>
          </table:table-cell>
          <table:table-cell table:style-name="表格14.A3" office:value-type="string">
            <text:p text:style-name="P33">1（至少有 1 個 key）</text:p>
          </table:table-cell>
        </table:table-row>
        <table:table-row table:style-name="表格14.1">
          <table:table-cell table:style-name="表格14.A2" office:value-type="string">
            <text:p text:style-name="P40">非根節點最少 key 數</text:p>
          </table:table-cell>
          <table:table-cell table:style-name="表格14.A2" office:value-type="string">
            <text:p text:style-name="P51">⌈m/2⌉ - 1</text:p>
          </table:table-cell>
        </table:table-row>
        <table:table-row table:style-name="表格14.1">
          <table:table-cell table:style-name="表格14.A3" office:value-type="string">
            <text:p text:style-name="P40">非根節點最少 children 數</text:p>
          </table:table-cell>
          <table:table-cell table:style-name="表格14.A3" office:value-type="string">
            <text:p text:style-name="P51">⌈m/2⌉</text:p>
          </table:table-cell>
        </table:table-row>
        <table:table-row table:style-name="表格14.1">
          <table:table-cell table:style-name="表格14.A2" office:value-type="string">
            <text:p text:style-name="P33">所有葉節點高度</text:p>
          </table:table-cell>
          <table:table-cell table:style-name="表格14.A2" office:value-type="string">
            <text:p text:style-name="P33">相同（嚴格平衡）</text:p>
          </table:table-cell>
        </table:table-row>
        <table:table-row table:style-name="表格14.1">
          <table:table-cell table:style-name="表格14.A3" office:value-type="string">
            <text:p text:style-name="P33">搜尋時間複雜度</text:p>
          </table:table-cell>
          <table:table-cell table:style-name="表格14.A3" office:value-type="string">
            <text:p text:style-name="P33">O(log n)</text:p>
          </table:table-cell>
        </table:table-row>
        <table:table-row table:style-name="表格14.1">
          <table:table-cell table:style-name="表格14.A2" office:value-type="string">
            <text:p text:style-name="P33">最大 key 數（高度 h）</text:p>
          </table:table-cell>
          <table:table-cell table:style-name="表格14.A2" office:value-type="string">
            <text:p text:style-name="P33">層層×(m-1)累計</text:p>
          </table:table-cell>
        </table:table-row>
      </table:table>
      <text:p text:style-name="P48"><text:s/></text:p>
      <text:h text:style-name="P15" text:outline-level="2">3.4 最少 key 數計算（考試最愛）</text:h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32">公式：<text:span text:style-name="T3">非根節點</text:span><text:span text:style-name="T48">最少</text:span> <text:span text:style-name="T65">key = ⌈m/2⌉ - 1</text:span></text:p>
            <text:p text:style-name="P54"/>
            <text:p text:style-name="P32">範例 1：B-Tree order 5</text:p>
            <text:p text:style-name="P54"><text:soft-page-break/><text:span text:style-name="T32"><text:s text:c="2"/>⌈5/2⌉ - 1 = ⌈2.5⌉ - 1 = 3 - 1 = 2 <text:s/>→ <text:s/>每非根節點至少 2 個 key</text:span></text:p>
            <text:p text:style-name="P54"/>
            <text:p text:style-name="P32">範例 2：B-Tree order 4</text:p>
            <text:p text:style-name="P32"><text:s text:c="2"/>⌈4/2⌉ - 1 = ⌈2⌉ - 1 = 2 - 1 = 1 <text:s text:c="2"/>→ <text:s/>每非根節點至少 1 個 key</text:p>
            <text:p text:style-name="P54"/>
            <text:p text:style-name="P32">範例 3：B-Tree order 6</text:p>
            <text:p text:style-name="P32"><text:s text:c="2"/>⌈6/2⌉ - 1 = ⌈3⌉ - 1 = 3 - 1 = 2 <text:s text:c="2"/>→ <text:s/>每非根節點至少 2 個 key</text:p>
          </table:table-cell>
        </table:table-row>
      </table:table>
      <text:p text:style-name="P45"/>
      <text:h text:style-name="P17" text:outline-level="2">3.4.1 公式這樣來的：不用死背，推導就好</text:h>
      <text:p text:style-name="P65"><text:span text:style-name="T53">核心觀念：</text:span><text:span text:style-name="T31">B-Tree 規定</text:span><text:span text:style-name="T36">非根節點「至少要半滿」</text:span><text:span text:style-name="T28">。知道這句話，公式自然推出來。</text:span></text:p>
      <text:p text:style-name="P66"><text:s/></text:p>
      <text:p text:style-name="P8">推導三步驟（以 order=5 為例）：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35">Step 1：<text:span text:style-name="T17">最多幾個 children？</text:span></text:p>
            <text:p text:style-name="P35"><text:s text:c="8"/><text:span text:style-name="T5">order=5</text:span> <text:s/>→ <text:s/><text:span text:style-name="T64">最多 5 個 children</text:span></text:p>
            <text:p text:style-name="P67"/>
            <text:p text:style-name="P35">Step 2：<text:span text:style-name="T17">至少要半滿，算最少 children</text:span></text:p>
            <text:p text:style-name="P37"><text:s text:c="8"/>5 ÷ 2 = 2.5 <text:s/>→ <text:s/>不能有 2.5 個孩子 <text:s/>→ <text:s/><text:span text:style-name="T64">向上取整 2.5⌉ = 3</text:span></text:p>
            <text:p text:style-name="P35"><text:s text:c="8"/>所以<text:span text:style-name="T64">至少 3 個 children</text:span></text:p>
            <text:p text:style-name="P67"/>
            <text:p text:style-name="P35">Step 3：children 換算成 key（用那條熟悉的公式）</text:p>
            <text:p text:style-name="P35"><text:s text:c="8"/>key = children - 1 = 3 - 1 = 2</text:p>
            <text:p text:style-name="P35"><text:s text:c="8"/>∴ <text:span text:style-name="T64">非根節點至少 2 個 key</text:span> <text:s text:c="2"/>✅</text:p>
          </table:table-cell>
        </table:table-row>
      </table:table>
      <text:p text:style-name="P66"><text:s/></text:p>
      <text:p text:style-name="P29">用同樣三步驟算四個 order，感受規律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63">order</text:p>
          </table:table-cell>
          <table:table-cell table:style-name="表格73.A1" office:value-type="string">
            <text:p text:style-name="P19"><text:span text:style-name="T50">最多</text:span> children</text:p>
          </table:table-cell>
          <table:table-cell table:style-name="表格73.A1" office:value-type="string">
            <text:p text:style-name="P19"><text:span text:style-name="T13">至少</text:span> children（半滿⌈m/2⌉）</text:p>
          </table:table-cell>
          <table:table-cell table:style-name="表格73.A1" office:value-type="string">
            <text:p text:style-name="P19"><text:span text:style-name="T13">至少</text:span> key（−1）</text:p>
          </table:table-cell>
        </table:table-row>
        <table:table-row table:style-name="表格73.1">
          <table:table-cell table:style-name="表格73.A2" office:value-type="string">
            <text:p text:style-name="P42">4</text:p>
          </table:table-cell>
          <table:table-cell table:style-name="表格73.A2" office:value-type="string">
            <text:p text:style-name="P36">4 個</text:p>
          </table:table-cell>
          <table:table-cell table:style-name="表格73.A2" office:value-type="string">
            <text:p text:style-name="P38">⌈4/2⌉ = 2 個</text:p>
          </table:table-cell>
          <table:table-cell table:style-name="表格73.A2" office:value-type="string">
            <text:p text:style-name="P36">2−1 = 1 個</text:p>
          </table:table-cell>
        </table:table-row>
        <table:table-row table:style-name="表格73.1">
          <table:table-cell table:style-name="表格73.A3" office:value-type="string">
            <text:p text:style-name="P42">5</text:p>
          </table:table-cell>
          <table:table-cell table:style-name="表格73.A3" office:value-type="string">
            <text:p text:style-name="P36">5 個</text:p>
          </table:table-cell>
          <table:table-cell table:style-name="表格73.A3" office:value-type="string">
            <text:p text:style-name="P36">⌈5/2⌉ = 3 個</text:p>
          </table:table-cell>
          <table:table-cell table:style-name="表格73.A3" office:value-type="string">
            <text:p text:style-name="P36">3−1 = 2 個</text:p>
          </table:table-cell>
        </table:table-row>
        <table:table-row table:style-name="表格73.4">
          <table:table-cell table:style-name="表格73.A2" office:value-type="string">
            <text:p text:style-name="P42">6</text:p>
          </table:table-cell>
          <table:table-cell table:style-name="表格73.A2" office:value-type="string">
            <text:p text:style-name="P36">6 個</text:p>
          </table:table-cell>
          <table:table-cell table:style-name="表格73.A2" office:value-type="string">
            <text:p text:style-name="P36">⌈6/2⌉ = 3 個</text:p>
          </table:table-cell>
          <table:table-cell table:style-name="表格73.A2" office:value-type="string">
            <text:p text:style-name="P36">3−1 = 2 個</text:p>
          </table:table-cell>
        </table:table-row>
        <table:table-row table:style-name="表格73.1">
          <table:table-cell table:style-name="表格73.A3" office:value-type="string">
            <text:p text:style-name="P42">7</text:p>
          </table:table-cell>
          <table:table-cell table:style-name="表格73.A3" office:value-type="string">
            <text:p text:style-name="P36">7 個</text:p>
          </table:table-cell>
          <table:table-cell table:style-name="表格73.A3" office:value-type="string">
            <text:p text:style-name="P36">⌈7/2⌉ = 4 個</text:p>
          </table:table-cell>
          <table:table-cell table:style-name="表格73.A3" office:value-type="string">
            <text:p text:style-name="P36">4−1 = 3 個</text:p>
          </table:table-cell>
        </table:table-row>
      </table:table>
      <text:p text:style-name="P66"><text:s/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69">考場上最快的解題流程（不需要記公式）</text:p>
            <text:p text:style-name="P30">題目問：B-Tree order m，非根節點最少幾個 key？</text:p>
            <text:p text:style-name="P68"/>
            <text:p text:style-name="P30">1. <text:span text:style-name="T64">算至少幾個 children</text:span>：⌈m/2⌉</text:p>
            <text:p text:style-name="P30">2. <text:span text:style-name="T64">減 1 </text:span>得 key 數：⌈m/2⌉ − 1</text:p>
            <text:p text:style-name="P68"/>
            <text:p text:style-name="P30">口訣：「<text:span text:style-name="T66">先算孩子，再減 1</text:span>」</text:p>
            <text:p text:style-name="P30">背景邏輯：<text:span text:style-name="T17">非根節點至少半滿</text:span> <text:s/>→ <text:s/>children ÷ 2 向上取整 <text:s/>→ <text:s/>再減 1</text:p>
          </table:table-cell>
        </table:table-row>
      </table:table>
      <text:p text:style-name="P66"><text:s text:c="2"/></text:p>
      <text:p text:style-name="P45"/>
      <text:h text:style-name="P15" text:outline-level="2"><text:soft-page-break/>3.5 B-Tree 與其他樹的等價關係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2">重要等價關係（必背！）</text:p>
            <text:p text:style-name="P26">2-3 Tree <text:s text:c="3"/>= B-Tree order 3</text:p>
            <text:p text:style-name="P26">2-3-4 Tree <text:s/>= B-Tree order 4 <text:s/>= (2,4)-Tree</text:p>
            <text:p text:style-name="P26"><text:span text:style-name="T60">(2,4)-Tree </text:span><text:s/>的意思：<text:span text:style-name="T2">每節點</text:span>有 <text:span text:style-name="T47">2 ~ 4 個 children</text:span></text:p>
            <text:p text:style-name="P26">Red-Black Tree ≈ 2-3-4 Tree（用二元樹形式表示的 2-3-4 Tree）</text:p>
          </table:table-cell>
        </table:table-row>
      </table:table>
      <text:p text:style-name="Standard"/>
      <text:h text:style-name="P14" text:outline-level="1">第四章　2-3 Tree 插入規則與完整範例</text:h>
      <text:h text:style-name="P15" text:outline-level="2">4.1 節點類型</text:h>
      <table:table table:name="表格19" table:style-name="表格19">
        <table:table-column table:style-name="表格19.A" table:number-columns-repeated="2"/>
        <table:table-row table:style-name="表格19.1">
          <table:table-cell table:style-name="表格19.A1" office:value-type="string">
            <text:p text:style-name="P9">2-node（一般節點）</text:p>
            <table:table table:name="表格17" table:style-name="表格17">
              <table:table-column table:style-name="表格17.A"/>
              <table:table-row table:style-name="表格17.1">
                <table:table-cell table:style-name="表格17.A1" office:value-type="string">
                  <text:p text:style-name="P32"><text:s text:c="4"/>[50]</text:p>
                  <text:p text:style-name="P32"><text:s text:c="3"/>/ <text:s text:c="3"/>\</text:p>
                  <text:p text:style-name="P32"><text:s/>(&lt;50) <text:s/>(&gt;50)</text:p>
                </table:table-cell>
              </table:table-row>
            </table:table>
            <text:p text:style-name="P31">只有 1 個 key，有 2 個子樹</text:p>
          </table:table-cell>
          <table:table-cell table:style-name="表格19.B1" office:value-type="string">
            <text:p text:style-name="P57">3-node（豐滿節點）</text:p>
            <table:table table:name="表格18" table:style-name="表格18">
              <table:table-column table:style-name="表格18.A"/>
              <table:table-row table:style-name="表格18.1">
                <table:table-cell table:style-name="表格18.A1" office:value-type="string">
                  <text:p text:style-name="P32"><text:s text:c="2"/>[30 | 60]</text:p>
                  <text:p text:style-name="P32"><text:s/>/ <text:s text:c="3"/>| <text:s text:c="3"/>\</text:p>
                  <text:p text:style-name="P32">(&lt;30)(30-60)(&gt;60)</text:p>
                </table:table-cell>
              </table:table-row>
            </table:table>
            <text:p text:style-name="P31">有 2 個 key，有 3 個子樹</text:p>
          </table:table-cell>
        </table:table-row>
      </table:table>
      <text:p text:style-name="P48"><text:s/></text:p>
      <text:h text:style-name="P15" text:outline-level="2">4.2 插入規則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2">插入流程（牢記）</text:p>
            <text:p text:style-name="P26">Step 1：依照搜尋規則找到正確葉節點</text:p>
            <text:p text:style-name="P26">Step 2：將新值插入該節點</text:p>
            <text:p text:style-name="P26">Step 3：若節點 key 數 ≤ 2 → 合法，結束</text:p>
            <text:p text:style-name="P26">Step 4：若節點有 3 個 key（Overflow）→ 執行 Split</text:p>
            <text:p text:style-name="P26"><text:s text:c="9"/>Split：中間 key 上推至父節點，左右各保留較小/較大 key</text:p>
            <text:p text:style-name="P26">Step 5：父節點若也 Overflow → 繼續往上 Split，直到根</text:p>
            <text:p text:style-name="P26">Step 6：若根節點也 Overflow → 根也 Split，樹高增加 1</text:p>
          </table:table-cell>
        </table:table-row>
      </table:table>
      <text:p text:style-name="P45"><text:s/></text:p>
      <text:h text:style-name="P15" text:outline-level="2">4.3 完整範例：插入 60, 70, 50, 10, 20, 80, 95, 90（112關Q3）</text:h>
      <text:h text:style-name="P6" text:outline-level="3">步驟① 插入 60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32">[60]</text:p>
          </table:table-cell>
        </table:table-row>
      </table:table>
      <text:h text:style-name="P6" text:outline-level="3">步驟② 插入 70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32">[60 | 70] <text:s text:c="2"/>← 仍合法（2 個 key）</text:p>
          </table:table-cell>
        </table:table-row>
      </table:table>
      <text:h text:style-name="P6" text:outline-level="3">步驟③ 插入 50 → Overflow → Split！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32">插入後：[50 | 60 | 70] <text:s text:c="2"/>← 3 個 key！Overflow！</text:p>
            <text:p text:style-name="P54"/>
            <text:p text:style-name="P32">Split：中間值 60 上推</text:p>
            <text:p text:style-name="P54"/>
            <text:p text:style-name="P32"><text:s text:c="5"/>[60]</text:p>
            <text:p text:style-name="P32"><text:s text:c="4"/>/ <text:s text:c="3"/>\</text:p>
            <text:p text:style-name="P32"><text:s text:c="2"/>[50] <text:s/>[70]</text:p>
          </table:table-cell>
        </table:table-row>
      </table:table>
      <text:h text:style-name="P71" text:outline-level="3"><text:soft-page-break/><text:span text:style-name="T55">步驟④ 插入 1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32">10 &lt; 60 → 往左子樹</text:p>
            <text:p text:style-name="P54"/>
            <text:p text:style-name="P32"><text:s text:c="5"/>[60]</text:p>
            <text:p text:style-name="P32"><text:s text:c="4"/>/ <text:s text:c="3"/>\</text:p>
            <text:p text:style-name="P32"><text:s/>[10|50] [70]</text:p>
          </table:table-cell>
        </table:table-row>
      </table:table>
      <text:h text:style-name="P6" text:outline-level="3">步驟⑤ 插入 20 → 左節點 Overflow → Split！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32">20 &lt; 60 → 往左子樹</text:p>
            <text:p text:style-name="P32">左節點變：[10 | 20 | 50] <text:s text:c="2"/>← Overflow！</text:p>
            <text:p text:style-name="P54"/>
            <text:p text:style-name="P32">Split：中間值 20 上推至根</text:p>
            <text:p text:style-name="P54"/>
            <text:p text:style-name="P32"><text:s text:c="7"/>[20 | 60]</text:p>
            <text:p text:style-name="P32"><text:s text:c="6"/>/ <text:s text:c="4"/>| <text:s text:c="3"/>\</text:p>
            <text:p text:style-name="P32"><text:s text:c="3"/>[10] <text:s text:c="2"/>[50] <text:s/>[70]</text:p>
          </table:table-cell>
        </table:table-row>
      </table:table>
      <text:h text:style-name="P6" text:outline-level="3">步驟⑥ 插入 80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32">80 &gt; 60 → 往右子樹</text:p>
            <text:p text:style-name="P54"/>
            <text:p text:style-name="P32"><text:s text:c="7"/>[20 | 60]</text:p>
            <text:p text:style-name="P32"><text:s text:c="6"/>/ <text:s text:c="4"/>| <text:s text:c="4"/>\</text:p>
            <text:p text:style-name="P32"><text:s text:c="3"/>[10] <text:s text:c="2"/>[50] <text:s/>[70|80]</text:p>
          </table:table-cell>
        </table:table-row>
      </table:table>
      <text:h text:style-name="P6" text:outline-level="3">步驟⑦ 插入 95 → 右節點 Overflow → 連鎖 Split！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32">95 &gt; 60 → 往右子樹</text:p>
            <text:p text:style-name="P32">右節點變：[70 | 80 | 95] <text:s text:c="2"/>← Overflow！</text:p>
            <text:p text:style-name="P54"/>
            <text:p text:style-name="P32">Split：中間值 80 上推至根</text:p>
            <text:p text:style-name="P32">根變：[20 | 60 | 80] <text:s text:c="2"/>← 根也 Overflow！</text:p>
            <text:p text:style-name="P54"/>
            <text:p text:style-name="P32">根 Split：中間值 60 上推，產生新根</text:p>
            <text:p text:style-name="P54"/>
            <text:p text:style-name="P32"><text:s text:c="10"/>[60]</text:p>
            <text:p text:style-name="P32"><text:s text:c="9"/>/ <text:s text:c="3"/>\</text:p>
            <text:p text:style-name="P32"><text:s text:c="6"/>[20] <text:s text:c="3"/>[80]</text:p>
            <text:p text:style-name="P32"><text:s text:c="5"/>/ <text:s text:c="3"/>\ <text:s/>/ <text:s text:c="3"/>\</text:p>
            <text:p text:style-name="P32"><text:s text:c="2"/>[10] [50][70] <text:s/>[95]</text:p>
          </table:table-cell>
        </table:table-row>
      </table:table>
      <text:h text:style-name="P6" text:outline-level="3">步驟⑧ 插入 90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32">90 &gt; 60 → 右子樹 [80]</text:p>
            <text:p text:style-name="P32">90 &gt; 80 → 右子樹 [95]</text:p>
            <text:p text:style-name="P32">插入 [95] → [90 | 95] <text:s text:c="2"/>← 合法</text:p>
            <text:p text:style-name="P54"/>
            <text:p text:style-name="P32"><text:s text:c="10"/>[60]</text:p>
            <text:p text:style-name="P54"><text:soft-page-break/><text:span text:style-name="T32"><text:s text:c="9"/>/ <text:s text:c="3"/>\</text:span></text:p>
            <text:p text:style-name="P32"><text:s text:c="6"/>[20] <text:s text:c="3"/>[80]</text:p>
            <text:p text:style-name="P32"><text:s text:c="5"/>/ <text:s text:c="3"/>\ <text:s/>/ <text:s text:c="5"/>\</text:p>
            <text:p text:style-name="P32"><text:s text:c="2"/>[10] [50][70] <text:s/>[90|95] <text:s text:c="2"/>✅ 建立完成！</text:p>
          </table:table-cell>
        </table:table-row>
      </table:table>
      <text:p text:style-name="Standard"/>
      <text:h text:style-name="P14" text:outline-level="1">第五章　2-3 Tree 刪除規則</text:h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72">本章只有一句核心思想</text:p>
            <text:p text:style-name="P77">插入太胖 → Split（分裂） <text:s/>； <text:s/>刪除太瘦 → Borrow（借）或 Merge（合併）</text:p>
            <text:p text:style-name="P77">只要把「太瘦」的問題搞清楚，整章就通了。</text:p>
          </table:table-cell>
        </table:table-row>
      </table:table>
      <text:p text:style-name="P92"/>
      <text:h text:style-name="P74" text:outline-level="1">5.1 <text:s/>刪除的本質：Underflow（太瘦了）</text:h>
      <text:p text:style-name="P78">插入時，節點可能「塞太多」→ Overflow，用 Split 解決。</text:p>
      <text:p text:style-name="P78">刪除時，節點可能「變太空」→ Underflow，用 Borrow 或 Merge 解決。</text:p>
      <text:p text:style-name="P92"/>
      <table:table table:name="表格30" table:style-name="表格30">
        <table:table-column table:style-name="表格30.A"/>
        <table:table-column table:style-name="表格30.B"/>
        <table:table-row table:style-name="表格30.1">
          <table:table-cell table:style-name="表格30.A1" office:value-type="string">
            <text:p text:style-name="P20">現象名稱</text:p>
          </table:table-cell>
          <table:table-cell table:style-name="表格30.A1" office:value-type="string">
            <text:p text:style-name="P20">原因 / 說明</text:p>
          </table:table-cell>
        </table:table-row>
        <table:table-row table:style-name="表格30.1">
          <table:table-cell table:style-name="表格30.A2" office:value-type="string">
            <text:p text:style-name="P99">現象名稱</text:p>
          </table:table-cell>
          <table:table-cell table:style-name="表格30.A2" office:value-type="string">
            <text:p text:style-name="P82">原因</text:p>
          </table:table-cell>
        </table:table-row>
        <table:table-row table:style-name="表格30.1">
          <table:table-cell table:style-name="表格30.A3" office:value-type="string">
            <text:p text:style-name="P99">Overflow</text:p>
          </table:table-cell>
          <table:table-cell table:style-name="表格30.A3" office:value-type="string">
            <text:p text:style-name="P93"><text:span text:style-name="T21">節點 key 超過上限</text:span><text:span text:style-name="T67">（多於 2 個，因為是2-3樹）</text:span></text:p>
          </table:table-cell>
        </table:table-row>
        <table:table-row table:style-name="表格30.1">
          <table:table-cell table:style-name="表格30.A2" office:value-type="string">
            <text:p text:style-name="P99">Underflow</text:p>
          </table:table-cell>
          <table:table-cell table:style-name="表格30.A2" office:value-type="string">
            <text:p text:style-name="P93"><text:span text:style-name="T69">刪除後</text:span><text:span text:style-name="T51">節點 key 低於下限</text:span><text:span text:style-name="T67">（</text:span><text:span text:style-name="T73">變成 0 個</text:span><text:span text:style-name="T67">）</text:span></text:p>
          </table:table-cell>
        </table:table-row>
      </table:table>
      <text:p text:style-name="P92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09">✅ <text:s/>Underflow 就是「空節點」</text:p>
            <text:p text:style-name="P94"><text:span text:style-name="T37">2-3 Tree 規定每個節點至少要有 1 個 key</text:span><text:span text:style-name="T71">。</text:span><text:span text:style-name="T74">刪除後若節點變成 [ ] 空節點</text:span><text:span text:style-name="T71">，就是 </text:span><text:span text:style-name="T69">Underflow</text:span><text:span text:style-name="T71">，必須修復。</text:span></text:p>
          </table:table-cell>
        </table:table-row>
      </table:table>
      <text:p text:style-name="P92"/>
      <text:h text:style-name="P74" text:outline-level="1">5.2 <text:s/>刪除的三種結果</text:h>
      <text:p text:style-name="P78">刪除任意一個 key 後，只會落入下面三種情況之一：</text:p>
      <text:p text:style-name="P92"/>
      <table:table table:name="表格32" table:style-name="表格32">
        <table:table-column table:style-name="表格32.A"/>
        <table:table-column table:style-name="表格32.B"/>
        <table:table-row table:style-name="表格32.1">
          <table:table-cell table:style-name="表格32.A1" office:value-type="string">
            <text:p text:style-name="P20">Case</text:p>
          </table:table-cell>
          <table:table-cell table:style-name="表格32.A1" office:value-type="string">
            <text:p text:style-name="P20">條件</text:p>
          </table:table-cell>
        </table:table-row>
        <table:table-row table:style-name="表格32.1">
          <table:table-cell table:style-name="表格32.A2" office:value-type="string">
            <text:p text:style-name="P99">Case 1</text:p>
          </table:table-cell>
          <table:table-cell table:style-name="表格32.A2" office:value-type="string">
            <text:p text:style-name="P93"><text:span text:style-name="T67">刪完後</text:span><text:span text:style-name="T45">節點仍有 key</text:span></text:p>
          </table:table-cell>
        </table:table-row>
        <table:table-row table:style-name="表格32.1">
          <table:table-cell table:style-name="表格32.A3" office:value-type="string">
            <text:p text:style-name="P99">Case 2</text:p>
          </table:table-cell>
          <table:table-cell table:style-name="表格32.A3" office:value-type="string">
            <text:p text:style-name="P93"><text:span text:style-name="T67">刪完後</text:span><text:span text:style-name="T45">節點變空</text:span><text:span text:style-name="T67">，且</text:span><text:span text:style-name="T21">兄弟有 ≥ 2 個 key</text:span></text:p>
          </table:table-cell>
        </table:table-row>
        <table:table-row table:style-name="表格32.1">
          <table:table-cell table:style-name="表格32.A2" office:value-type="string">
            <text:p text:style-name="P99">Case 3</text:p>
          </table:table-cell>
          <table:table-cell table:style-name="表格32.A2" office:value-type="string">
            <text:p text:style-name="P93"><text:span text:style-name="T67">刪完後</text:span><text:span text:style-name="T45">節點變空</text:span><text:span text:style-name="T67">，且</text:span><text:span text:style-name="T21">兄弟只有 1 個 key</text:span></text:p>
          </table:table-cell>
        </table:table-row>
      </table:table>
      <text:p text:style-name="P92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4">Case 1 範例</text:p>
            <text:p text:style-name="P91">[10 | 20] <text:s/>刪除 20 <text:s/>→ <text:s/>[10] <text:s/>← 仍有 1 個 key，完全合法，結束。</text:p>
          </table:table-cell>
        </table:table-row>
      </table:table>
      <text:p text:style-name="P92"/>
      <text:h text:style-name="P95" text:outline-level="1"><text:soft-page-break/><text:span text:style-name="T75">5.3 <text:s/>Borrow（借）的完整原理</text:span></text:h>
      <text:h text:style-name="P108" text:outline-level="2">5.3.1 <text:s/>為什麼不能「直接」把兄弟的 key 搬過來？</text:h>
      <text:p text:style-name="P78">這是超級新手最常卡住的地方。看下面的例子：</text:p>
      <text:p text:style-name="P92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12">刪除 10 之後，左邊空了：</text:p>
            <text:p text:style-name="P39"><text:s text:c="8"/>[20] <text:s text:c="7"/></text:p>
            <text:p text:style-name="P39"><text:s text:c="7"/>/ <text:s text:c="3"/>\ <text:s text:c="6"/></text:p>
            <text:p text:style-name="P39"><text:s text:c="6"/>[] <text:s text:c="2"/>[50|70] <text:s/></text:p>
          </table:table-cell>
        </table:table-row>
      </table:table>
      <text:p text:style-name="P92"/>
      <text:p text:style-name="P78">直覺上你可能想：「直接把 50 搬到左邊不就好了？」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6"><text:span text:style-name="T26">⚠️ <text:s/></text:span><text:span text:style-name="T27">直接搬會破壞搜尋樹規則！</text:span></text:p>
            <text:p text:style-name="P94"><text:span text:style-name="T37">搜尋樹規定：左子樹所有值 &lt; 父節點 key &lt; 右子樹所有值</text:span><text:span text:style-name="T71">。 若把 50 直接搬到左邊，50 會跑到 [20] 左側，但 50 &gt; 20，完全違規！</text:span></text:p>
          </table:table-cell>
        </table:table-row>
      </table:table>
      <text:p text:style-name="P92"/>
      <text:h text:style-name="P97" text:outline-level="2"><text:span text:style-name="T77">5.3.2 <text:s/></text:span><text:span text:style-name="T78">Borrow</text:span><text:span text:style-name="T77"> 的正確流程：</text:span><text:span text:style-name="T52">父下兄上</text:span></text:h>
      <text:p text:style-name="P118"><text:span text:style-name="T72">Borrow 的核心動作是「</text:span><text:span text:style-name="T46">父節點下降、兄弟節點上升</text:span><text:span text:style-name="T72">」，這樣才能維持搜尋順序。</text:span></text:p>
      <text:p text:style-name="P92"/>
      <table:table table:name="表格36" table:style-name="表格36">
        <table:table-column table:style-name="表格36.A"/>
        <table:table-column table:style-name="表格36.B"/>
        <table:table-row table:style-name="表格36.1">
          <table:table-cell table:style-name="表格36.A1" office:value-type="string">
            <text:p text:style-name="P20">步驟</text:p>
          </table:table-cell>
          <table:table-cell table:style-name="表格36.A1" office:value-type="string">
            <text:p text:style-name="P20">說明</text:p>
          </table:table-cell>
        </table:table-row>
        <table:table-row table:style-name="表格36.1">
          <table:table-cell table:style-name="表格36.A2" office:value-type="string">
            <text:p text:style-name="P99">Step 1</text:p>
          </table:table-cell>
          <table:table-cell table:style-name="表格36.A2" office:value-type="string">
            <text:p text:style-name="P93"><text:span text:style-name="T69">父節點</text:span><text:span text:style-name="T67">中，「</text:span><text:span text:style-name="T21">夾在空節點與兄弟之間的 key</text:span><text:span text:style-name="T67">」</text:span><text:span text:style-name="T68">下降到空節點</text:span></text:p>
          </table:table-cell>
        </table:table-row>
        <table:table-row table:style-name="表格36.1">
          <table:table-cell table:style-name="表格36.A3" office:value-type="string">
            <text:p text:style-name="P99">Step 2</text:p>
          </table:table-cell>
          <table:table-cell table:style-name="表格36.A3" office:value-type="string">
            <text:p text:style-name="P93"><text:span text:style-name="T70">兄弟節點</text:span><text:span text:style-name="T67">中，「</text:span><text:span text:style-name="T51">最靠近父節點的 key</text:span><text:span text:style-name="T67">」</text:span><text:span text:style-name="T68">上升取代父節點的空缺</text:span></text:p>
          </table:table-cell>
        </table:table-row>
        <table:table-row table:style-name="表格36.1">
          <table:table-cell table:style-name="表格36.A2" office:value-type="string">
            <text:p text:style-name="P99">結果</text:p>
          </table:table-cell>
          <table:table-cell table:style-name="表格36.A2" office:value-type="string">
            <text:p text:style-name="P93"><text:span text:style-name="T69">空節點得到一個 key</text:span><text:span text:style-name="T67">，搜尋樹規則完整保留</text:span></text:p>
          </table:table-cell>
        </table:table-row>
      </table:table>
      <text:p text:style-name="P92"/>
      <text:p text:style-name="P107">以剛才的例子示範完整過程：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00">Step 1：父節點 [20] 的 key「20」下降</text:p>
            <text:p text:style-name="P39"><text:s text:c="8"/>[?] <text:s text:c="8"/></text:p>
            <text:p text:style-name="P39"><text:s text:c="7"/>/ <text:s text:c="3"/>\ <text:s text:c="6"/></text:p>
            <text:p text:style-name="P39"><text:s text:c="5"/>[20] <text:s/>[50|70] <text:s/></text:p>
          </table:table-cell>
        </table:table-row>
      </table:table>
      <text:p text:style-name="P92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10">Step 2：右兄弟最小值「50」上升填補父節點空缺</text:p>
            <text:p text:style-name="P39"><text:s text:c="8"/>[50] <text:s text:c="7"/></text:p>
            <text:p text:style-name="P39"><text:s text:c="7"/>/ <text:s text:c="3"/>\ <text:s text:c="6"/></text:p>
            <text:p text:style-name="P39"><text:s text:c="5"/>[20] <text:s text:c="2"/>[70] <text:s text:c="2"/>✅</text:p>
          </table:table-cell>
        </table:table-row>
      </table:table>
      <text:p text:style-name="P92"/>
      <text:h text:style-name="P108" text:outline-level="2">5.3.3 <text:s/>從左借 vs. 從右借</text:h>
      <text:p text:style-name="P78">根據空節點的兄弟在左邊還是右邊，Borrow 的方向不同，但口訣同一條：</text:p>
      <text:p text:style-name="P92"><text:soft-page-break/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19">Borrow 黃金口訣</text:p>
            <text:p text:style-name="P79"><text:span text:style-name="T2">從左兄弟借</text:span> <text:s/>→ <text:s/><text:span text:style-name="T47">取左兄弟的「最大值」上升</text:span></text:p>
            <text:p text:style-name="P80"><text:span text:style-name="T2">從右兄弟借</text:span> <text:s/>→ <text:s/><text:span text:style-name="T43">取右兄弟的「最小值」上升</text:span></text:p>
            <text:p text:style-name="P83">（都是<text:span text:style-name="T34">「最靠近空節點」的那個 key</text:span>）</text:p>
          </table:table-cell>
        </table:table-row>
      </table:table>
      <text:p text:style-name="P92"/>
      <text:p text:style-name="P107">從左兄弟借的範例：</text:p>
      <table:table table:name="表格75" table:style-name="表格75">
        <table:table-column table:style-name="表格75.A"/>
        <table:table-row table:style-name="表格75.1">
          <table:table-cell table:style-name="表格75.A1" office:value-type="string">
            <text:p text:style-name="P100">空節點在中間，左兄弟 [10|20] 有兩個 key</text:p>
            <text:p text:style-name="P39"><text:s text:c="7"/>[40|80] <text:s text:c="7"/></text:p>
            <text:p text:style-name="P39"><text:s text:c="6"/>/ <text:s text:c="2"/>| <text:s text:c="2"/>\ <text:s text:c="6"/></text:p>
            <text:p text:style-name="P39"><text:s text:c="2"/>[10|20] [] <text:s/>[90] <text:s text:c="3"/></text:p>
          </table:table-cell>
        </table:table-row>
      </table:table>
      <text:p text:style-name="P92"/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110"><text:span text:style-name="T64">父 40 下降，左兄弟最大值 20 上升</text:span> → 完成</text:p>
            <text:p text:style-name="P39"><text:s text:c="7"/>[20|80] <text:s text:c="7"/></text:p>
            <text:p text:style-name="P39"><text:s text:c="6"/>/ <text:s text:c="2"/>| <text:s text:c="2"/>\ <text:s text:c="6"/></text:p>
            <text:p text:style-name="P39"><text:s text:c="4"/>[10] [40] [90] <text:s/>✅ </text:p>
          </table:table-cell>
        </table:table-row>
      </table:table>
      <text:p text:style-name="P92"/>
      <text:h text:style-name="P108" text:outline-level="2">5.3.4 <text:s/>左右兄弟都能借，選哪個？</text:h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84">大多數教材規定：優先選左兄弟。若左兄弟無法借（只有 1 個 key），再看右兄弟。</text:p>
            <text:p text:style-name="P113">⚠️ 考試若題目未指定，依左優先原則作答即可。</text:p>
          </table:table-cell>
        </table:table-row>
      </table:table>
      <text:p text:style-name="P92"/>
      <text:h text:style-name="P74" text:outline-level="1">5.4 <text:s/>Merge（合併）的完整原理</text:h>
      <text:h text:style-name="P108" text:outline-level="2">5.4.1 <text:s/>什麼情況下進入 Merge？</text:h>
      <text:p text:style-name="P78"><text:span text:style-name="T64">當節點變空</text:span>，而且<text:span text:style-name="T8">左右兄弟都只有 1 個 key</text:span>（<text:span text:style-name="T65">沒有多餘的 key 可以借</text:span>），<text:span text:style-name="T64">就必須 Merge</text:span>。</text:p>
      <text:p text:style-name="P92"/>
      <text:h text:style-name="P108" text:outline-level="2">5.4.2 <text:s/>Merge 的步驟</text:h>
      <table:table table:name="表格78" table:style-name="表格78">
        <table:table-column table:style-name="表格78.A"/>
        <table:table-column table:style-name="表格78.B"/>
        <table:table-row table:style-name="表格78.1">
          <table:table-cell table:style-name="表格78.A1" office:value-type="string">
            <text:p text:style-name="P20">步驟</text:p>
          </table:table-cell>
          <table:table-cell table:style-name="表格78.A1" office:value-type="string">
            <text:p text:style-name="P20">說明</text:p>
          </table:table-cell>
        </table:table-row>
        <table:table-row table:style-name="表格78.1">
          <table:table-cell table:style-name="表格78.A2" office:value-type="string">
            <text:p text:style-name="P99">Step 1</text:p>
          </table:table-cell>
          <table:table-cell table:style-name="表格78.A2" office:value-type="string">
            <text:p text:style-name="P82">找到「<text:span text:style-name="T47">夾在空節點與兄弟之間的父 key</text:span>」</text:p>
          </table:table-cell>
        </table:table-row>
        <table:table-row table:style-name="表格78.1">
          <table:table-cell table:style-name="表格78.A3" office:value-type="string">
            <text:p text:style-name="P99">Step 2</text:p>
          </table:table-cell>
          <table:table-cell table:style-name="表格78.A3" office:value-type="string">
            <text:p text:style-name="P82">該父 key 下降</text:p>
          </table:table-cell>
        </table:table-row>
        <table:table-row table:style-name="表格78.1">
          <table:table-cell table:style-name="表格78.A2" office:value-type="string">
            <text:p text:style-name="P99">Step 3</text:p>
          </table:table-cell>
          <table:table-cell table:style-name="表格78.A2" office:value-type="string">
            <text:p text:style-name="P82">空節點 + 父 key + 兄弟節點 → 合併為一個新節點</text:p>
          </table:table-cell>
        </table:table-row>
        <table:table-row table:style-name="表格78.1">
          <table:table-cell table:style-name="表格78.A3" office:value-type="string">
            <text:p text:style-name="P99">Step 4</text:p>
          </table:table-cell>
          <table:table-cell table:style-name="表格78.A3" office:value-type="string">
            <text:p text:style-name="P82">父節點失去一個 key 後，檢查父節點是否也空了（若空了，繼續往上）</text:p>
          </table:table-cell>
        </table:table-row>
      </table:table>
      <text:p text:style-name="P92"/>
      <text:p text:style-name="P118"><text:soft-page-break/><text:span text:style-name="T79">Merge 範例：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12">刪除 50 後右邊空了，<text:span text:style-name="T64">兄弟 [10] 只有 1 個 key，無法借</text:span></text:p>
            <text:p text:style-name="P39"><text:s text:c="7"/>[20] <text:s text:c="4"/></text:p>
            <text:p text:style-name="P39"><text:s text:c="6"/>/ <text:s text:c="3"/>\ <text:s text:c="3"/></text:p>
            <text:p text:style-name="P39"><text:s text:c="3"/>[10] <text:s text:c="3"/>[] <text:s text:c="2"/></text:p>
          </table:table-cell>
        </table:table-row>
      </table:table>
      <text:p text:style-name="P92"/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131">父 20 下降，與兄弟 [10] 合併為 [10|20]</text:p>
            <text:p text:style-name="P39"><text:s text:c="4"/>[10|20] <text:s text:c="3"/>✅ </text:p>
          </table:table-cell>
        </table:table-row>
      </table:table>
      <text:p text:style-name="P92"/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4">為什麼 Merge 之後合法？</text:p>
            <text:p text:style-name="P85"><text:span text:style-name="T64">空節點（0 個 key）</text:span>+ <text:span text:style-name="T64">父 key（1 個）</text:span>+ <text:span text:style-name="T64">兄弟（1 個）</text:span>= <text:span text:style-name="T47">新節點（2 個 key）</text:span>。</text:p>
            <text:p text:style-name="P85"><text:span text:style-name="T80">2 個 key 完全符合 2-3 Tree 上限</text:span>，合法！</text:p>
          </table:table-cell>
        </table:table-row>
      </table:table>
      <text:p text:style-name="P92"/>
      <text:h text:style-name="P74" text:outline-level="1">5.5 <text:s/>Cascade Merge（連鎖合併）與 Root 消失</text:h>
      <text:h text:style-name="P108" text:outline-level="2">5.5.1 <text:s/>什麼是 Cascade Merge？</text:h>
      <text:p text:style-name="P78">Merge 之後父節點可能也因此失去了自己的 key，變空。這時候父節點又觸發一輪新的 Borrow 或 Merge，一路向上傳遞，就叫做「連鎖 Merge（Cascade Merge）」。</text:p>
      <text:p text:style-name="P92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0">範例起始樹：</text:p>
            <text:p text:style-name="P39"><text:s text:c="12"/>[50] <text:s text:c="11"/></text:p>
            <text:p text:style-name="P39"><text:s text:c="11"/>/ <text:s text:c="3"/>\ <text:s text:c="10"/></text:p>
            <text:p text:style-name="P39"><text:s text:c="9"/>[20] <text:s text:c="2"/>[80] <text:s text:c="7"/></text:p>
            <text:p text:style-name="P39"><text:s text:c="8"/>/ <text:s text:c="2"/>\ <text:s text:c="2"/>/ <text:s text:c="2"/>\ <text:s text:c="6"/></text:p>
            <text:p text:style-name="P39"><text:s text:c="6"/>[10] [30][70] [90] <text:s text:c="3"/></text:p>
          </table:table-cell>
        </table:table-row>
      </table:table>
      <text:p text:style-name="P92"/>
      <text:p text:style-name="P81">現在刪除 30：</text:p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112">Step 1：直接刪 30，右邊空了</text:p>
            <text:p text:style-name="P39"><text:s text:c="12"/>[50] <text:s text:c="8"/></text:p>
            <text:p text:style-name="P39"><text:s text:c="11"/>/ <text:s text:c="3"/>\ <text:s text:c="7"/></text:p>
            <text:p text:style-name="P39"><text:s text:c="9"/>[20] <text:s text:c="2"/>[80] <text:s text:c="4"/></text:p>
            <text:p text:style-name="P39"><text:s text:c="8"/>/ <text:s text:c="2"/>\ <text:s text:c="11"/></text:p>
            <text:p text:style-name="P39"><text:s text:c="6"/>[10] <text:s/>[] <text:s text:c="10"/></text:p>
          </table:table-cell>
        </table:table-row>
      </table:table>
      <text:p text:style-name="P92"/>
      <text:p text:style-name="P78"><text:span text:style-name="T2">兄弟 [10] 只有 1 個 key，無法借</text:span> → <text:span text:style-name="T17">Merge</text:span>：</text:p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110">Step 2：<text:span text:style-name="T81">父 20 下降，與 [10] 合併</text:span>，父節點消失</text:p>
            <text:p text:style-name="P39"><text:s text:c="10"/>[50] <text:s text:c="7"/></text:p>
            <text:p text:style-name="P39"><text:s text:c="9"/>/ <text:s text:c="3"/>\ <text:s text:c="6"/></text:p>
            <text:p text:style-name="P39"><text:s text:c="6"/>[10|20] [80] <text:s text:c="3"/></text:p>
            <text:p text:style-name="P98"><text:soft-page-break/><text:span text:style-name="T32"><text:s text:c="14"/>/ <text:s text:c="2"/>\ <text:s text:c="2"/></text:span></text:p>
            <text:p text:style-name="P39"><text:s text:c="11"/>[70] [90] <text:s/>✅</text:p>
          </table:table-cell>
        </table:table-row>
      </table:table>
      <text:p text:style-name="P92"/>
      <text:p text:style-name="P78">這個例子只有一層 Merge。若父節點合併後也空掉，就會繼續往祖父節點傳遞。</text:p>
      <text:p text:style-name="P92"/>
      <text:h text:style-name="P108" text:outline-level="2">5.5.2 <text:s/>Root 消失（樹高下降）</text:h>
      <text:p text:style-name="P78"><text:span text:style-name="T34">Cascade Merge 一路傳遞到根節點（Root）</text:span>時，<text:span text:style-name="T2">Root 自己也可能因為失去 key 而消失</text:span>。<text:span text:style-name="T44">這是 2-3 Tree 中「樹高下降」的唯一時機</text:span>。</text:p>
      <text:p text:style-name="P92"/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15">⚠️ <text:span text:style-name="T23"><text:s/>Root 是特例！</text:span></text:p>
            <text:p text:style-name="P85"><text:span text:style-name="T47">一般節點：至少 1 個 key</text:span>。 Root 例外：<text:span text:style-name="T64">當 Merge 後 Root 自然消失時</text:span>，<text:span text:style-name="T12">下面那層升上來成為新 Root，樹高減少 1</text:span>。</text:p>
          </table:table-cell>
        </table:table-row>
      </table:table>
      <text:p text:style-name="P92"/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120">Root 消失範例：<text:span text:style-name="T66">Merge 後只剩一個節點</text:span>，<text:span text:style-name="T23">它升為新 Root</text:span></text:p>
            <text:p text:style-name="P39">原本： <text:s text:c="8"/>[50] <text:s text:c="6"/></text:p>
            <text:p text:style-name="P39"><text:s text:c="14"/>/ <text:s text:c="3"/>\ <text:s text:c="5"/></text:p>
            <text:p text:style-name="P39"><text:s text:c="11"/>[20] <text:s text:c="2"/>[] <text:s text:c="5"/></text:p>
            <text:p text:style-name="P39"><text:s text:c="26"/></text:p>
            <text:p text:style-name="P39">Merge 後： <text:s/>[20|50] <text:s text:c="6"/></text:p>
            <text:p text:style-name="P39">（<text:span text:style-name="T2">Root 消失</text:span>，<text:span text:style-name="T44">[20|50] 成為新 Root</text:span>，<text:span text:style-name="T34">樹高從 2 降為 1</text:span>）</text:p>
          </table:table-cell>
        </table:table-row>
      </table:table>
      <text:p text:style-name="P92"/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72">Cascade Merge 連鎖口訣</text:p>
            <text:p text:style-name="P77">Merge 完問一句：「父節點還有 key 嗎？」</text:p>
            <text:p text:style-name="P77">有 key → 結束 <text:s/>· <text:s/>沒 key → 父節點變成新的空節點，繼續修</text:p>
            <text:p text:style-name="P77">修到 Root 也空 → <text:span text:style-name="T34">Root 消失，樹高 - 1</text:span></text:p>
          </table:table-cell>
        </table:table-row>
      </table:table>
      <text:p text:style-name="P92"/>
      <text:h text:style-name="P74" text:outline-level="1">5.6 <text:s/>Successor 與 Predecessor（內部節點的替身）</text:h>
      <text:h text:style-name="P108" text:outline-level="2">5.6.1 <text:s/><text:span text:style-name="T23">為什麼內部節點不能直接刪？</text:span></text:h>
      <text:p text:style-name="P78"><text:span text:style-name="T62">內部節點的 key </text:span>負責<text:span text:style-name="T10">「分隔」左右子樹的範圍</text:span>。<text:span text:style-name="T82">若直接刪掉，樹結構會失去方向感</text:span>，搜尋規則被破壞。</text:p>
      <text:p text:style-name="P92"/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12">直接刪 60 的災難：子樹不知道方向</text:p>
            <text:p text:style-name="P39">原本： <text:s/>[60] <text:s text:c="4"/>直接刪： <text:s/>[] <text:s text:c="5"/></text:p>
            <text:p text:style-name="P39"><text:s text:c="7"/>/ <text:s text:c="3"/>\ <text:s text:c="12"/>/ <text:s text:c="2"/>\ <text:s text:c="3"/></text:p>
            <text:p text:style-name="P39"><text:s text:c="5"/>[20] <text:s/>[80] <text:s text:c="8"/>[20] [80] <text:s/>← 違法！</text:p>
          </table:table-cell>
        </table:table-row>
      </table:table>
      <text:p text:style-name="P92"/>
      <text:h text:style-name="P97" text:outline-level="2"><text:soft-page-break/><text:span text:style-name="T77">5.6.2 <text:s/>解法：</text:span><text:span text:style-name="T22">先找替身</text:span><text:span text:style-name="T77">，再刪葉節點</text:span></text:h>
      <table:table table:name="表格89" table:style-name="表格89">
        <table:table-column table:style-name="表格89.A"/>
        <table:table-column table:style-name="表格89.B"/>
        <table:table-row table:style-name="表格89.1">
          <table:table-cell table:style-name="表格89.A1" office:value-type="string">
            <text:p text:style-name="P20">名稱</text:p>
          </table:table-cell>
          <table:table-cell table:style-name="表格89.A1" office:value-type="string">
            <text:p text:style-name="P20">定義</text:p>
          </table:table-cell>
        </table:table-row>
        <table:table-row table:style-name="表格89.1">
          <table:table-cell table:style-name="表格89.A2" office:value-type="string">
            <text:p text:style-name="P102">後繼（Successor）</text:p>
          </table:table-cell>
          <table:table-cell table:style-name="表格89.A2" office:value-type="string">
            <text:p text:style-name="P82"><text:span text:style-name="T8">比被刪 key「大」的</text:span><text:span text:style-name="T47">最小值</text:span></text:p>
          </table:table-cell>
        </table:table-row>
        <table:table-row table:style-name="表格89.1">
          <table:table-cell table:style-name="表格89.A3" office:value-type="string">
            <text:p text:style-name="P102">前驅（Predecessor）</text:p>
          </table:table-cell>
          <table:table-cell table:style-name="表格89.A3" office:value-type="string">
            <text:p text:style-name="P82"><text:span text:style-name="T34">比被刪 key「小」的</text:span><text:span text:style-name="T47">最大值</text:span></text:p>
          </table:table-cell>
        </table:table-row>
      </table:table>
      <text:p text:style-name="P92"/>
      <text:p text:style-name="P107">為什麼後繼/前驅可以成為替身？</text:p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86"><text:span text:style-name="T2">後繼（右子樹最小值）</text:span>一定滿足：<text:span text:style-name="T18">比被刪 key 大，且比右子樹其他所有值都小</text:span>。</text:p>
            <text:p text:style-name="P87"><text:span text:style-name="T2">前驅（左子樹最大值）</text:span>一定滿足：<text:span text:style-name="T83">比被刪 key 小，且比左子樹其他所有值都大</text:span>。</text:p>
            <text:p text:style-name="P101">→ 替換後，左 &lt; 新key &lt; 右 的搜尋規則完全不變！</text:p>
          </table:table-cell>
        </table:table-row>
      </table:table>
      <text:p text:style-name="P92"/>
      <text:h text:style-name="P108" text:outline-level="2">5.6.3 <text:s/>完整替換流程</text:h>
      <table:table table:name="表格91" table:style-name="表格91">
        <table:table-column table:style-name="表格91.A"/>
        <table:table-column table:style-name="表格91.B"/>
        <table:table-row table:style-name="表格91.1">
          <table:table-cell table:style-name="表格91.A1" office:value-type="string">
            <text:p text:style-name="P20">步驟</text:p>
          </table:table-cell>
          <table:table-cell table:style-name="表格91.A1" office:value-type="string">
            <text:p text:style-name="P20">說明</text:p>
          </table:table-cell>
        </table:table-row>
        <table:table-row table:style-name="表格91.1">
          <table:table-cell table:style-name="表格91.A2" office:value-type="string">
            <text:p text:style-name="P99">Step 1</text:p>
          </table:table-cell>
          <table:table-cell table:style-name="表格91.A2" office:value-type="string">
            <text:p text:style-name="P52">找到後繼（或前驅）</text:p>
          </table:table-cell>
        </table:table-row>
        <table:table-row table:style-name="表格91.1">
          <table:table-cell table:style-name="表格91.A3" office:value-type="string">
            <text:p text:style-name="P99">Step 2</text:p>
          </table:table-cell>
          <table:table-cell table:style-name="表格91.A3" office:value-type="string">
            <text:p text:style-name="P82"><text:span text:style-name="T84">用後繼 key 覆蓋</text:span>被刪的內部節點 key</text:p>
          </table:table-cell>
        </table:table-row>
        <table:table-row table:style-name="表格91.1">
          <table:table-cell table:style-name="表格91.A2" office:value-type="string">
            <text:p text:style-name="P99">Step 3</text:p>
          </table:table-cell>
          <table:table-cell table:style-name="表格91.A2" office:value-type="string">
            <text:p text:style-name="P64">去原來後繼所在的葉節點，刪除它</text:p>
          </table:table-cell>
        </table:table-row>
        <table:table-row table:style-name="表格91.1">
          <table:table-cell table:style-name="表格91.A3" office:value-type="string">
            <text:p text:style-name="P99">Step 4</text:p>
          </table:table-cell>
          <table:table-cell table:style-name="表格91.A3" office:value-type="string">
            <text:p text:style-name="P82">此時問題已轉換為「刪除葉節點」，套用一般流程（Borrow / Merge）</text:p>
          </table:table-cell>
        </table:table-row>
      </table:table>
      <text:p text:style-name="P92"/>
      <table:table table:name="表格92" table:style-name="表格92">
        <table:table-column table:style-name="表格92.A"/>
        <table:table-row table:style-name="表格92.1">
          <table:table-cell table:style-name="表格92.A1" office:value-type="string">
            <text:p text:style-name="P100">範例：刪除 80（內部節點）</text:p>
            <text:p text:style-name="P39">目前樹： <text:s text:c="24"/></text:p>
            <text:p text:style-name="P39"><text:s text:c="11"/>[60] <text:s text:c="17"/></text:p>
            <text:p text:style-name="P39"><text:s text:c="10"/>/ <text:s text:c="3"/>\ <text:s text:c="16"/></text:p>
            <text:p text:style-name="P39"><text:s text:c="7"/>[10] <text:s text:c="3"/>[80] <text:s text:c="13"/></text:p>
            <text:p text:style-name="P39"><text:s text:c="15"/>/ <text:s text:c="2"/>\ <text:s text:c="12"/></text:p>
            <text:p text:style-name="P39"><text:s text:c="12"/>[70] <text:s/>[90|95] <text:s text:c="7"/></text:p>
            <text:p text:style-name="P39"><text:s text:c="33"/></text:p>
            <text:p text:style-name="P39">→ <text:span text:style-name="T17">找後繼：右子樹最小值 = 90</text:span> <text:s text:c="6"/></text:p>
            <text:p text:style-name="P39">→ <text:span text:style-name="T64">用 90 取代 80：</text:span> <text:s text:c="15"/></text:p>
            <text:p text:style-name="P39"><text:s text:c="11"/>[60] <text:s text:c="17"/></text:p>
            <text:p text:style-name="P39"><text:s text:c="10"/>/ <text:s text:c="3"/>\ <text:s text:c="16"/></text:p>
            <text:p text:style-name="P39"><text:s text:c="7"/>[10] <text:s text:c="3"/><text:span text:style-name="T64">[90]</text:span> <text:s text:c="13"/></text:p>
            <text:p text:style-name="P39"><text:s text:c="15"/>/ <text:s text:c="2"/>\ <text:s text:c="12"/></text:p>
            <text:p text:style-name="P39"><text:s text:c="12"/>[70] <text:s/>[90|95] <text:s text:c="7"/></text:p>
            <text:p text:style-name="P39"><text:s text:c="33"/></text:p>
            <text:p text:style-name="P39">→ <text:span text:style-name="T3">刪葉節點 [90|95] 中的 90</text:span>： <text:s text:c="4"/></text:p>
            <text:p text:style-name="P39"><text:s text:c="11"/>[60] <text:s text:c="17"/></text:p>
            <text:p text:style-name="P39"><text:s text:c="10"/>/ <text:s text:c="3"/>\ <text:s text:c="16"/></text:p>
            <text:p text:style-name="P39"><text:s text:c="7"/>[10] <text:s text:c="3"/>[90] <text:s text:c="13"/></text:p>
            <text:p text:style-name="P39"><text:s text:c="15"/>/ <text:s text:c="2"/>\ <text:s text:c="12"/></text:p>
            <text:p text:style-name="P39"><text:s text:c="12"/>[70] <text:s text:c="2"/>[95] <text:s text:c="2"/>✅ <text:s text:c="4"/></text:p>
          </table:table-cell>
        </table:table-row>
      </table:table>
      <text:p text:style-name="P92"/>
      <text:h text:style-name="P95" text:outline-level="1"><text:soft-page-break/><text:span text:style-name="T75">5.7 <text:s/>完整刪除範例：刪 50 → 刪 20 → 刪 80（含完整推導）</text:span></text:h>
      <text:p text:style-name="P78">起始樹（第四章插入 60, 70, 50, 10, 20, 80, 95, 90 後的結果）：</text:p>
      <text:p text:style-name="P92"/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75">起始樹</text:p>
            <text:p text:style-name="P39"><text:s text:c="12"/>[60] <text:s text:c="16"/></text:p>
            <text:p text:style-name="P39"><text:s text:c="11"/>/ <text:s text:c="3"/>\ <text:s text:c="15"/></text:p>
            <text:p text:style-name="P39"><text:s text:c="8"/>[20] <text:s text:c="3"/>[80] <text:s text:c="12"/></text:p>
            <text:p text:style-name="P39"><text:s text:c="8"/>/ <text:s/>\ <text:s text:c="3"/>/ <text:s text:c="2"/>\ <text:s text:c="11"/></text:p>
            <text:p text:style-name="P39"><text:s text:c="5"/>[10] [50][70] [90|95] <text:s text:c="6"/></text:p>
          </table:table-cell>
        </table:table-row>
      </table:table>
      <text:p text:style-name="P92"/>
      <text:p text:style-name="P92"/>
      <text:h text:style-name="P108" text:outline-level="2">Step 1：刪除 50</text:h>
      <table:table table:name="表格94" table:style-name="表格94">
        <table:table-column table:style-name="表格94.A"/>
        <table:table-column table:style-name="表格94.B"/>
        <table:table-row table:style-name="表格94.1">
          <table:table-cell table:style-name="表格94.A1" office:value-type="string">
            <text:p text:style-name="P20">判斷點</text:p>
          </table:table-cell>
          <table:table-cell table:style-name="表格94.A1" office:value-type="string">
            <text:p text:style-name="P20">結果</text:p>
          </table:table-cell>
        </table:table-row>
        <table:table-row table:style-name="表格94.1">
          <table:table-cell table:style-name="表格94.A2" office:value-type="string">
            <text:p text:style-name="P99">50 是葉節點嗎？</text:p>
          </table:table-cell>
          <table:table-cell table:style-name="表格94.A2" office:value-type="string">
            <text:p text:style-name="P82">是 → 直接刪</text:p>
          </table:table-cell>
        </table:table-row>
        <table:table-row table:style-name="表格94.1">
          <table:table-cell table:style-name="表格94.A3" office:value-type="string">
            <text:p text:style-name="P103">刪完後？</text:p>
          </table:table-cell>
          <table:table-cell table:style-name="表格94.A3" office:value-type="string">
            <text:p text:style-name="P122">[50] 變空 → Underflow！</text:p>
          </table:table-cell>
        </table:table-row>
        <table:table-row table:style-name="表格94.1">
          <table:table-cell table:style-name="表格94.A2" office:value-type="string">
            <text:p text:style-name="P99"><text:span text:style-name="T66">左兄弟 [10]</text:span>？</text:p>
          </table:table-cell>
          <table:table-cell table:style-name="表格94.A2" office:value-type="string">
            <text:p text:style-name="P82"><text:span text:style-name="T85">只有 1 個 key</text:span> → 無法借</text:p>
          </table:table-cell>
        </table:table-row>
        <table:table-row table:style-name="表格94.1">
          <table:table-cell table:style-name="表格94.A3" office:value-type="string">
            <text:p text:style-name="P99"><text:span text:style-name="T66">右兄弟 [70]</text:span>？</text:p>
          </table:table-cell>
          <table:table-cell table:style-name="表格94.A3" office:value-type="string">
            <text:p text:style-name="P82"><text:span text:style-name="T85">只有 1 個 key</text:span> → 無法借</text:p>
          </table:table-cell>
        </table:table-row>
        <table:table-row table:style-name="表格94.1">
          <table:table-cell table:style-name="表格94.A2" office:value-type="string">
            <text:p text:style-name="P99">結論</text:p>
          </table:table-cell>
          <table:table-cell table:style-name="表格94.A2" office:value-type="string">
            <text:p text:style-name="P123">Borrow 失敗 → <text:span text:style-name="T57">進入 Merge</text:span></text:p>
          </table:table-cell>
        </table:table-row>
        <table:table-row table:style-name="表格94.1">
          <table:table-cell table:style-name="表格94.A3" office:value-type="string">
            <text:p text:style-name="P99">Merge 動作</text:p>
          </table:table-cell>
          <table:table-cell table:style-name="表格94.A3" office:value-type="string">
            <text:p text:style-name="P82">父 key「20」下降，與兄弟 [10] 合併 → [10|20]</text:p>
          </table:table-cell>
        </table:table-row>
      </table:table>
      <text:p text:style-name="P92"/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0">刪除 50 後的結果</text:p>
            <text:p text:style-name="P39"><text:s text:c="12"/>[60] <text:s text:c="13"/></text:p>
            <text:p text:style-name="P39"><text:s text:c="11"/>/ <text:s text:c="3"/>\ <text:s text:c="12"/></text:p>
            <text:p text:style-name="P39"><text:s text:c="6"/>[10|20] <text:s text:c="2"/>[80] <text:s text:c="9"/></text:p>
            <text:p text:style-name="P39"><text:s text:c="15"/>/ <text:s text:c="2"/>\ <text:s text:c="9"/></text:p>
            <text:p text:style-name="P39"><text:s text:c="12"/>[70] [90|95] <text:s text:c="2"/>✅ </text:p>
          </table:table-cell>
        </table:table-row>
      </table:table>
      <text:p text:style-name="P92"/>
      <text:p text:style-name="P92"/>
      <text:h text:style-name="P108" text:outline-level="2">Step 2：刪除 20</text:h>
      <table:table table:name="表格96" table:style-name="表格96">
        <table:table-column table:style-name="表格96.A"/>
        <table:table-column table:style-name="表格96.B"/>
        <table:table-row table:style-name="表格96.1">
          <table:table-cell table:style-name="表格96.A1" office:value-type="string">
            <text:p text:style-name="P20">判斷點</text:p>
          </table:table-cell>
          <table:table-cell table:style-name="表格96.A1" office:value-type="string">
            <text:p text:style-name="P20">結果</text:p>
          </table:table-cell>
        </table:table-row>
        <table:table-row table:style-name="表格96.1">
          <table:table-cell table:style-name="表格96.A2" office:value-type="string">
            <text:p text:style-name="P99">20 是葉節點嗎？</text:p>
          </table:table-cell>
          <table:table-cell table:style-name="表格96.A2" office:value-type="string">
            <text:p text:style-name="P82">是（[10|20] 是葉節點）→ 直接刪</text:p>
          </table:table-cell>
        </table:table-row>
        <table:table-row table:style-name="表格96.1">
          <table:table-cell table:style-name="表格96.A3" office:value-type="string">
            <text:p text:style-name="P99">刪完後？</text:p>
          </table:table-cell>
          <table:table-cell table:style-name="表格96.A3" office:value-type="string">
            <text:p text:style-name="P82">[10|20] → [10]，仍有 1 個 key，合法！</text:p>
          </table:table-cell>
        </table:table-row>
        <table:table-row table:style-name="表格96.1">
          <table:table-cell table:style-name="表格96.A2" office:value-type="string">
            <text:p text:style-name="P99">結論</text:p>
          </table:table-cell>
          <table:table-cell table:style-name="表格96.A2" office:value-type="string">
            <text:p text:style-name="P82">Case 1，直接結束，不需 Borrow 或 Merge</text:p>
          </table:table-cell>
        </table:table-row>
      </table:table>
      <text:p text:style-name="P92"/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9">✅ <text:s/>最常見錯誤</text:p>
            <text:p text:style-name="P94"><text:soft-page-break/><text:span text:style-name="T14">看到刪除就去找 Borrow！</text:span><text:span text:style-name="T63">其實刪完若還有 key，直接結束。</text:span><text:span text:style-name="T71">Case 1 是最常見的情況。</text:span></text:p>
          </table:table-cell>
        </table:table-row>
      </table:table>
      <text:p text:style-name="P92"/>
      <table:table table:name="表格98" table:style-name="表格98">
        <table:table-column table:style-name="表格98.A"/>
        <table:table-row table:style-name="表格98.1">
          <table:table-cell table:style-name="表格98.A1" office:value-type="string">
            <text:p text:style-name="P110">刪除 20 後的結果</text:p>
            <text:p text:style-name="P39"><text:s text:c="12"/>[60] <text:s text:c="13"/></text:p>
            <text:p text:style-name="P39"><text:s text:c="11"/>/ <text:s text:c="3"/>\ <text:s text:c="12"/></text:p>
            <text:p text:style-name="P39"><text:s text:c="9"/>[10] <text:s text:c="2"/>[80] <text:s text:c="9"/></text:p>
            <text:p text:style-name="P39"><text:s text:c="15"/>/ <text:s text:c="2"/>\ <text:s text:c="9"/></text:p>
            <text:p text:style-name="P39"><text:s text:c="12"/>[70] [90|95] <text:s text:c="2"/>✅ </text:p>
          </table:table-cell>
        </table:table-row>
      </table:table>
      <text:p text:style-name="P92"/>
      <text:p text:style-name="P92"/>
      <text:h text:style-name="P108" text:outline-level="2">Step 3：刪除 80（內部節點）</text:h>
      <table:table table:name="表格99" table:style-name="表格99">
        <table:table-column table:style-name="表格99.A"/>
        <table:table-column table:style-name="表格99.B"/>
        <table:table-row table:style-name="表格99.1">
          <table:table-cell table:style-name="表格99.A1" office:value-type="string">
            <text:p text:style-name="P20">判斷點</text:p>
          </table:table-cell>
          <table:table-cell table:style-name="表格99.A1" office:value-type="string">
            <text:p text:style-name="P20">結果</text:p>
          </table:table-cell>
        </table:table-row>
        <table:table-row table:style-name="表格99.1">
          <table:table-cell table:style-name="表格99.A2" office:value-type="string">
            <text:p text:style-name="P99">80 是葉節點嗎？</text:p>
          </table:table-cell>
          <table:table-cell table:style-name="表格99.A2" office:value-type="string">
            <text:p text:style-name="P82">不是！[80] 下面有 [70] 和 [90|95]</text:p>
          </table:table-cell>
        </table:table-row>
        <table:table-row table:style-name="表格99.1">
          <table:table-cell table:style-name="表格99.A3" office:value-type="string">
            <text:p text:style-name="P99">做法</text:p>
          </table:table-cell>
          <table:table-cell table:style-name="表格99.A3" office:value-type="string">
            <text:p text:style-name="P52">找替身（後繼或前驅）</text:p>
          </table:table-cell>
        </table:table-row>
        <table:table-row table:style-name="表格99.1">
          <table:table-cell table:style-name="表格99.A2" office:value-type="string">
            <text:p text:style-name="P99">後繼（Successor）</text:p>
          </table:table-cell>
          <table:table-cell table:style-name="表格99.A2" office:value-type="string">
            <text:p text:style-name="P90">右子樹 [90|95] 的最小值 = 90</text:p>
          </table:table-cell>
        </table:table-row>
        <table:table-row table:style-name="表格99.1">
          <table:table-cell table:style-name="表格99.A3" office:value-type="string">
            <text:p text:style-name="P99">Step A</text:p>
          </table:table-cell>
          <table:table-cell table:style-name="表格99.A3" office:value-type="string">
            <text:p text:style-name="P90">用 90 取代 80</text:p>
          </table:table-cell>
        </table:table-row>
        <table:table-row table:style-name="表格99.1">
          <table:table-cell table:style-name="表格99.A2" office:value-type="string">
            <text:p text:style-name="P99">Step B</text:p>
          </table:table-cell>
          <table:table-cell table:style-name="表格99.A2" office:value-type="string">
            <text:p text:style-name="P82"><text:span text:style-name="T34">刪葉節點 [90|95] 中的 90</text:span> → [95]，合法</text:p>
          </table:table-cell>
        </table:table-row>
        <table:table-row table:style-name="表格99.1">
          <table:table-cell table:style-name="表格99.A3" office:value-type="string">
            <text:p text:style-name="P99">結論</text:p>
          </table:table-cell>
          <table:table-cell table:style-name="表格99.A3" office:value-type="string">
            <text:p text:style-name="P82">完成，不需 Borrow 或 Merge</text:p>
          </table:table-cell>
        </table:table-row>
      </table:table>
      <text:p text:style-name="P92"/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10">刪除 80 後的最終結果</text:p>
            <text:p text:style-name="P39"><text:s text:c="12"/>[60] <text:s text:c="13"/></text:p>
            <text:p text:style-name="P39"><text:s text:c="11"/>/ <text:s text:c="3"/>\ <text:s text:c="12"/></text:p>
            <text:p text:style-name="P39"><text:s text:c="9"/>[10] <text:s text:c="2"/>[90] <text:s text:c="9"/></text:p>
            <text:p text:style-name="P39"><text:s text:c="15"/>/ <text:s text:c="2"/>\ <text:s text:c="9"/></text:p>
            <text:p text:style-name="P39"><text:s text:c="12"/>[70] <text:s/>[95] <text:s text:c="4"/>✅ </text:p>
          </table:table-cell>
        </table:table-row>
      </table:table>
      <text:p text:style-name="P92"/>
      <table:table table:name="表格101" table:style-name="表格101">
        <table:table-column table:style-name="表格101.A"/>
        <table:table-row table:style-name="表格101.1">
          <table:table-cell table:style-name="表格101.A1" office:value-type="string">
            <text:p text:style-name="P115">⚠️ <text:s/>關於筆記中「方法 A / 方法 B 兩種都合法」的說明</text:p>
            <text:p text:style-name="P85">部分教材或老師採用不同的刪除重整策略（例如優先重排樹的結構），可能得到 [70] / [10|60] [90|95] 等不同的合法結果。 <text:s/>這不是「同一題可以隨便做」，而是「不同演算法策略會得出不同但各自合法的樹」。 <text:s/>公職考試建議：統一使用「後繼取代法（Successor Replacement）」，即 Step A + Step B 的流程，最安全、最通用。</text:p>
          </table:table-cell>
        </table:table-row>
      </table:table>
      <text:p text:style-name="P92"/>
      <text:h text:style-name="P74" text:outline-level="1">5.8 <text:s/>考場最終決策流程圖</text:h>
      <text:p text:style-name="P78">只要照著下面這張決策樹走，任何 2-3 Tree 刪除題都可以自行推導，不需死背範例。</text:p>
      <text:p text:style-name="P92"/>
      <table:table table:name="表格102" table:style-name="表格102">
        <table:table-column table:style-name="表格102.A"/>
        <text:soft-page-break/>
        <table:table-row table:style-name="表格102.1">
          <table:table-cell table:style-name="表格102.A1" office:value-type="string">
            <text:p text:style-name="P73">2-3 Tree 刪除決策樹</text:p>
            <text:p text:style-name="P105">1. <text:s/><text:span text:style-name="T66">要刪的 key 是葉節點嗎</text:span><text:span text:style-name="T86">？</text:span></text:p>
            <text:p text:style-name="P85"><text:s text:c="4"/><text:span text:style-name="T64">否 → 找後繼</text:span>（<text:span text:style-name="T8">右子樹最小值</text:span>）<text:span text:style-name="T64">或前驅</text:span>（<text:span text:style-name="T19">左子樹最大值</text:span>），用它取代，再去葉節點刪它，轉 Step 2</text:p>
            <text:p text:style-name="P88"><text:s text:c="4"/><text:span text:style-name="T87">是 → 直接刪</text:span>，轉 Step 2</text:p>
            <text:p text:style-name="P106">2. <text:span text:style-name="T86"><text:s/>刪完後節點還有 key 嗎？</text:span></text:p>
            <text:p text:style-name="P111"><text:s text:c="4"/><text:span text:style-name="T64">是（還有 ≥ 1 個 key）</text:span>→ 結束 ✅</text:p>
            <text:p text:style-name="P88"><text:s text:c="4"/>否（空節點）→ 轉 Step 3</text:p>
            <text:p text:style-name="P106">3. <text:s/><text:span text:style-name="T86">兄弟有 ≥ 2 個 key 嗎？</text:span>（<text:span text:style-name="T23">優先看左兄弟，再看右兄弟</text:span>）</text:p>
            <text:p text:style-name="P89"><text:s text:c="4"/><text:span text:style-name="T47">是 → Borrow（父下兄上）</text:span>：</text:p>
            <text:p text:style-name="P89"><text:s text:c="10"/>從<text:span text:style-name="T34">左</text:span>借：<text:span text:style-name="T34">左兄弟最大值上升</text:span>，<text:span text:style-name="T64">父 key 下降</text:span></text:p>
            <text:p text:style-name="P111"><text:s text:c="10"/>從<text:span text:style-name="T38">右</text:span>借：<text:span text:style-name="T38">右兄弟最小值上升</text:span>，<text:span text:style-name="T64">父 key 下降</text:span> <text:s/>→ 結束 ✅</text:p>
            <text:p text:style-name="P88"><text:s text:c="3"/><text:span text:style-name="T2"><text:s/>否</text:span> → <text:span text:style-name="T47">Merge</text:span>（<text:span text:style-name="T17">父 key 下降，與兄弟合併</text:span>）→ 轉 Step 4</text:p>
            <text:p text:style-name="P106">4. <text:span text:style-name="T86"><text:s/>Merge 後，父節點還有 key 嗎？</text:span></text:p>
            <text:p text:style-name="P111"><text:s text:c="4"/>是 → 結束 ✅</text:p>
            <text:p text:style-name="P114"><text:s text:c="4"/>否 → 父節點成為新的空節點，回到 Step 3（Cascade Merge）</text:p>
            <text:p text:style-name="P106">5. <text:s/><text:span text:style-name="T86">Cascade Merge 傳遞到 Root 了嗎？</text:span></text:p>
            <text:p text:style-name="P111"><text:s text:c="4"/>Root 仍有 key → 結束 ✅</text:p>
            <text:p text:style-name="P121"><text:s text:c="4"/>Root 空了 → <text:span text:style-name="T64">Root 消失，</text:span><text:span text:style-name="T38">下面那層升為新 Root</text:span><text:span text:style-name="T64">，樹高 - 1 </text:span>✅</text:p>
          </table:table-cell>
        </table:table-row>
      </table:table>
      <text:p text:style-name="P92"/>
      <text:h text:style-name="P74" text:outline-level="1">5.9 <text:s/>考試口訣總整理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72">口訣一：刪除本質</text:p>
            <text:p text:style-name="P77">插入太胖用 Split（中位數上推）；刪除太瘦先 Borrow，借不到用 Merge</text:p>
          </table:table-cell>
        </table:table-row>
      </table:table>
      <text:p text:style-name="P92"/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72">口訣二：Borrow</text:p>
            <text:p text:style-name="P77">父下兄上 <text:s/>· <text:s/>從<text:span text:style-name="T88">左借取最大值 <text:s/>· <text:s/>從右借取最小值</text:span></text:p>
          </table:table-cell>
        </table:table-row>
      </table:table>
      <text:p text:style-name="P92"/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72">口訣三：Merge</text:p>
            <text:p text:style-name="P77"><text:span text:style-name="T88">父 key 下降 + 與兄弟合體</text:span> <text:s/>· <text:s/>Merge 完問：父節點還有 key 嗎？</text:p>
          </table:table-cell>
        </table:table-row>
      </table:table>
      <text:p text:style-name="P92"/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72">口訣四：<text:span text:style-name="T23">內部節點</text:span></text:p>
            <text:p text:style-name="P77">先找<text:span text:style-name="T89">後繼（右子樹最小）</text:span>或<text:span text:style-name="T89">前驅（左子樹最大）</text:span>當替身，轉成葉節點刪除</text:p>
          </table:table-cell>
        </table:table-row>
      </table:table>
      <text:p text:style-name="P92"/>
      <table:table table:name="表格107" table:style-name="表格107">
        <table:table-column table:style-name="表格107.A"/>
        <table:table-row table:style-name="表格107.1">
          <table:table-cell table:style-name="表格107.A1" office:value-type="string">
            <text:p text:style-name="P2"><text:span text:style-name="T76">口訣五：Cascade Merge</text:span><text:soft-page-break/></text:p>
            <text:p text:style-name="P77">合併後爸爸也破產 → 找爺爺幫忙 → 一路傳到 Root → Root 消失 →<text:span text:style-name="T90"> 樹高 -1</text:span></text:p>
          </table:table-cell>
        </table:table-row>
      </table:table>
      <text:p text:style-name="P92"/>
      <text:p text:style-name="P92"/>
      <table:table table:name="表格108" table:style-name="表格108">
        <table:table-column table:style-name="表格108.A"/>
        <table:table-row table:style-name="表格108.1">
          <table:table-cell table:style-name="表格108.A1" office:value-type="string">
            <text:p text:style-name="P76">掌握本章你已超越附件原版第 5 章！</text:p>
            <text:p text:style-name="P83">原版只涵蓋約 40% 的考試需求；本章補全了：Underflow 概念、左借右借、兩種 Borrow、</text:p>
            <text:p text:style-name="P83">Cascade Merge、Root 消失、Successor / Predecessor 原理、完整決策流程圖。</text:p>
          </table:table-cell>
        </table:table-row>
      </table:table>
      <text:p text:style-name="P83">Cascade Merge、Root 消失、Successor / Predecessor 原理、完整決策流程圖。</text:p>
      <text:h text:style-name="P14" text:outline-level="1">第六章　2-3-4 Tree 與 (2,4)-Tree</text:h>
      <text:h text:style-name="P15" text:outline-level="2">6.1 節點類型（三種）</text:h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D"/>
        <table:table-row table:style-name="表格40.1">
          <table:table-cell table:style-name="表格40.A1" office:value-type="string">
            <text:p text:style-name="P18">節點類型</text:p>
          </table:table-cell>
          <table:table-cell table:style-name="表格40.A1" office:value-type="string">
            <text:p text:style-name="P18">key 數</text:p>
          </table:table-cell>
          <table:table-cell table:style-name="表格40.A1" office:value-type="string">
            <text:p text:style-name="P18">children 數</text:p>
          </table:table-cell>
          <table:table-cell table:style-name="表格40.A1" office:value-type="string">
            <text:p text:style-name="P18"><text:span text:style-name="T23">key 的</text:span>外觀</text:p>
          </table:table-cell>
        </table:table-row>
        <table:table-row table:style-name="表格40.1">
          <table:table-cell table:style-name="表格40.A2" office:value-type="string">
            <text:p text:style-name="P33">2-node</text:p>
          </table:table-cell>
          <table:table-cell table:style-name="表格40.A2" office:value-type="string">
            <text:p text:style-name="P43">1</text:p>
          </table:table-cell>
          <table:table-cell table:style-name="表格40.A2" office:value-type="string">
            <text:p text:style-name="P44">2</text:p>
          </table:table-cell>
          <table:table-cell table:style-name="表格40.A2" office:value-type="string">
            <text:p text:style-name="P124">[50]</text:p>
          </table:table-cell>
        </table:table-row>
        <table:table-row table:style-name="表格40.1">
          <table:table-cell table:style-name="表格40.A3" office:value-type="string">
            <text:p text:style-name="P33">3-node</text:p>
          </table:table-cell>
          <table:table-cell table:style-name="表格40.A3" office:value-type="string">
            <text:p text:style-name="P43">2</text:p>
          </table:table-cell>
          <table:table-cell table:style-name="表格40.A3" office:value-type="string">
            <text:p text:style-name="P44">3</text:p>
          </table:table-cell>
          <table:table-cell table:style-name="表格40.A3" office:value-type="string">
            <text:p text:style-name="P124">[20|50]</text:p>
          </table:table-cell>
        </table:table-row>
        <table:table-row table:style-name="表格40.1">
          <table:table-cell table:style-name="表格40.A2" office:value-type="string">
            <text:p text:style-name="P33">4-node</text:p>
          </table:table-cell>
          <table:table-cell table:style-name="表格40.A2" office:value-type="string">
            <text:p text:style-name="P43">3</text:p>
          </table:table-cell>
          <table:table-cell table:style-name="表格40.A2" office:value-type="string">
            <text:p text:style-name="P44">4</text:p>
          </table:table-cell>
          <table:table-cell table:style-name="表格40.A2" office:value-type="string">
            <text:p text:style-name="P124">[20|50|80]</text:p>
          </table:table-cell>
        </table:table-row>
      </table:table>
      <text:p text:style-name="P48"><text:s/></text:p>
      <text:h text:style-name="P15" text:outline-level="2">6.2 為什麼叫 (2,4)-Tree？</text:h>
      <text:p text:style-name="P25">名稱來自<text:span text:style-name="T49">每個節點的 </text:span><text:span text:style-name="T82">children 數量範圍</text:span>：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32">children <text:span text:style-name="T2">最少</text:span><text:span text:style-name="T64"> = 2（2-node</text:span> 的情況）</text:p>
            <text:p text:style-name="P32">children <text:span text:style-name="T6">最多</text:span><text:span text:style-name="T91"> = 4（4-node</text:span> 的情況）</text:p>
            <text:p text:style-name="P54"/>
            <text:p text:style-name="P32">因此：<text:span text:style-name="T43">(2,4)-Tree = 2-3-4 Tree = B-Tree order 4</text:span></text:p>
          </table:table-cell>
        </table:table-row>
      </table:table>
      <text:p text:style-name="P45"><text:s/></text:p>
      <text:h text:style-name="P15" text:outline-level="2">6.3 插入規則（與 2-3 Tree 相同，只是容量多一格）</text:h>
      <text:p text:style-name="P25"><text:span text:style-name="T17">當節點滿（4 個 key，也就是 5 個 children）</text:span>時才 Overflow，執行 Split，中間 key 上推。</text:p>
      <text:p text:style-name="P45"><text:s/></text:p>
      <text:h text:style-name="P15" text:outline-level="2">6.4 為什麼需要 2-3-4 Tree？</text:h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25">2-3 Tree vs 2-3-4 Tree</text:p>
            <text:p text:style-name="P26">2-3 Tree：<text:span text:style-name="T2">每節點</text:span><text:span text:style-name="T47">最多</text:span> 2 個 key，較常分裂</text:p>
            <text:p text:style-name="P26">2-3-4 Tree：<text:span text:style-name="T2">每節點</text:span><text:span text:style-name="T47">最多</text:span> 3 個 key，分裂次數較少</text:p>
            <text:p text:style-name="P26">2-3-4 Tree 的優點：插入效率更高</text:p>
            <text:p text:style-name="P26">2-3-4 Tree 的缺點：節點空間稍浪費（不一定填滿）</text:p>
            <text:p text:style-name="P26">最重要的是：<text:span text:style-name="T34">2-3-4 Tree 是 Red-Black Tree 的理論基礎</text:span></text:p>
          </table:table-cell>
        </table:table-row>
      </table:table>
      <text:p text:style-name="Standard"/>
      <text:h text:style-name="P14" text:outline-level="1">第七章　Red-Black Tree 與 2-3-4 Tree 對應</text:h>
      <text:h text:style-name="P15" text:outline-level="2">7.1 <text:span text:style-name="T23">為什麼發明 Red-Black Tree？</text:span></text:h>
      <text:p text:style-name="P25">2-3-4 <text:span text:style-name="T93">Tree 概念好但難實作</text:span>（<text:span text:style-name="T47">一個節點要存 1~3 個 key</text:span>，<text:span text:style-name="T2">程式複雜</text:span>）。Red-Black Tree 的想法：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6">Red-Black Tree 的核心思想</text:p>
            <text:p text:style-name="P26">我<text:span text:style-name="T35">還是用二元樹（每個節點只存 1 個 key）</text:span></text:p>
            <text:p text:style-name="P26">但我<text:span text:style-name="T9">用「顏色（紅/黑）」來標記節點之間的關係</text:span></text:p>
            <text:p text:style-name="P132">紅色節點 = 和父節點「邏輯上是同一個 2-3-4 Tree 節點」</text:p>
            <text:p text:style-name="P26">黑色節點 = 獨立的節點</text:p>
          </table:table-cell>
        </table:table-row>
      </table:table>
      <text:p text:style-name="P48"><text:s/></text:p>
      <text:h text:style-name="P15" text:outline-level="2">7.2 對應關係（超重要！）</text:h>
      <table:table table:name="表格44" table:style-name="表格44">
        <table:table-column table:style-name="表格44.A" table:number-columns-repeated="2"/>
        <table:table-column table:style-name="表格44.C"/>
        <table:table-row table:style-name="表格44.1">
          <table:table-cell table:style-name="表格44.A1" office:value-type="string">
            <text:p text:style-name="P18">2-3-4 Tree 節點</text:p>
          </table:table-cell>
          <table:table-cell table:style-name="表格44.A1" office:value-type="string">
            <text:p text:style-name="P18">包含 key</text:p>
          </table:table-cell>
          <table:table-cell table:style-name="表格44.A1" office:value-type="string">
            <text:p text:style-name="P18">Red-Black Tree 表示</text:p>
          </table:table-cell>
        </table:table-row>
        <table:table-row table:style-name="表格44.1">
          <table:table-cell table:style-name="表格44.A2" office:value-type="string">
            <text:p text:style-name="P33">2-node</text:p>
          </table:table-cell>
          <table:table-cell table:style-name="表格44.A2" office:value-type="string">
            <text:p text:style-name="P33">[50]</text:p>
          </table:table-cell>
          <table:table-cell table:style-name="表格44.A2" office:value-type="string">
            <text:p text:style-name="P33">50(黑)</text:p>
          </table:table-cell>
        </table:table-row>
        <table:table-row table:style-name="表格44.1">
          <table:table-cell table:style-name="表格44.A3" office:value-type="string">
            <text:p text:style-name="P33">3-node（左紅）</text:p>
          </table:table-cell>
          <table:table-cell table:style-name="表格44.A3" office:value-type="string">
            <text:p text:style-name="P33">[20|50]</text:p>
          </table:table-cell>
          <table:table-cell table:style-name="表格44.A3" office:value-type="string">
            <text:p text:style-name="P33">50(黑) 左子 20(紅)</text:p>
          </table:table-cell>
        </table:table-row>
        <table:table-row table:style-name="表格44.1">
          <table:table-cell table:style-name="表格44.A2" office:value-type="string">
            <text:p text:style-name="P33">3-node（右紅）</text:p>
          </table:table-cell>
          <table:table-cell table:style-name="表格44.A2" office:value-type="string">
            <text:p text:style-name="P33">[20|50]</text:p>
          </table:table-cell>
          <table:table-cell table:style-name="表格44.A2" office:value-type="string">
            <text:p text:style-name="P33">20(黑) 右子 50(紅)</text:p>
          </table:table-cell>
        </table:table-row>
        <table:table-row table:style-name="表格44.1">
          <table:table-cell table:style-name="表格44.A3" office:value-type="string">
            <text:p text:style-name="P33">4-node</text:p>
          </table:table-cell>
          <table:table-cell table:style-name="表格44.A3" office:value-type="string">
            <text:p text:style-name="P33">[20|50|80]</text:p>
          </table:table-cell>
          <table:table-cell table:style-name="表格44.A3" office:value-type="string">
            <text:p text:style-name="P33">50(黑) 左子20(紅) 右子80(紅)</text:p>
          </table:table-cell>
        </table:table-row>
      </table:table>
      <text:p text:style-name="P45"><text:s/></text:p>
      <text:p text:style-name="P25">4-node 對應的 Red-Black Tree 圖形：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32">2-3-4 Tree： <text:s/>[20 | 50 | 80]</text:p>
            <text:p text:style-name="P54"/>
            <text:p text:style-name="P32">Red-Black Tree：</text:p>
            <text:p text:style-name="P32"><text:s text:c="10"/>50(黑)</text:p>
            <text:p text:style-name="P32"><text:s text:c="9"/>/ <text:s text:c="5"/>\</text:p>
            <text:p text:style-name="P32"><text:s text:c="7"/>20(紅) <text:s text:c="2"/>80(紅)</text:p>
          </table:table-cell>
        </table:table-row>
      </table:table>
      <text:p text:style-name="P45"><text:s/></text:p>
      <text:h text:style-name="P127" text:outline-level="2"><text:span text:style-name="T94">7.2.1 顏色的真正含義：常見誤解與正確說法</text:span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34"><text:span text:style-name="T41">⚠️ 常見誤解：「黑色節點 = 獨立節點」</text:span></text:p>
            <text:p text:style-name="P135"><text:span text:style-name="T28">很多教材直接說「黑色節點 = 獨立節點」，這句話不夠精確，考試時容易踩坑。</text:span></text:p>
            <text:p text:style-name="P135"/>
            <text:p text:style-name="P135"><text:span text:style-name="T28">反例：4-node [20|40|60] 對應的 Red-Black Tree 是：</text:span></text:p>
            <text:p text:style-name="P135"><text:span text:style-name="T28"><text:s text:c="8"/>40(黑)</text:span></text:p>
            <text:p text:style-name="P135"><text:span text:style-name="T28"><text:s text:c="7"/>/ <text:s text:c="3"/>\</text:span></text:p>
            <text:p text:style-name="P135"><text:span text:style-name="T28"><text:s text:c="3"/>20(紅) <text:s/>60(紅)</text:span></text:p>
            <text:p text:style-name="P135"/>
            <text:p text:style-name="P135"><text:span text:style-name="T28">如果說「40(黑) 是獨立節點」，就錯了。</text:span></text:p>
            <text:p text:style-name="P135"><text:span text:style-name="T28">因為 40(黑)、20(紅)、60(紅) 三個節點合在一起才代表同一個 4-node。</text:span></text:p>
            <text:p text:style-name="P135"><text:span text:style-name="T28">40(黑) 不是獨立的，它是這個 4-node 的「核心代表」。</text:span></text:p>
          </table:table-cell>
        </table:table-row>
      </table:table>
      <text:p text:style-name="P136"><text:soft-page-break/><text:s/></text:p>
      <text:p text:style-name="P137"><text:span text:style-name="T53">正確說法（考試建議背這版）：</text:span></text:p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130"><text:span text:style-name="T96">顏色</text:span></text:p>
          </table:table-cell>
          <table:table-cell table:style-name="表格110.A1" office:value-type="string">
            <text:p text:style-name="P130"><text:span text:style-name="T96">精確定義</text:span></text:p>
          </table:table-cell>
          <table:table-cell table:style-name="表格110.A1" office:value-type="string">
            <text:p text:style-name="P130"><text:span text:style-name="T96">白話記憶</text:span></text:p>
          </table:table-cell>
        </table:table-row>
        <table:table-row table:style-name="表格110.1">
          <table:table-cell table:style-name="表格110.A2" office:value-type="string">
            <text:p text:style-name="P138"><text:span text:style-name="T32">紅色節點</text:span></text:p>
          </table:table-cell>
          <table:table-cell table:style-name="表格110.A2" office:value-type="string">
            <text:p text:style-name="P138"><text:span text:style-name="T32">與黑色父節點同屬一個 2-3-4 Tree 節點</text:span></text:p>
          </table:table-cell>
          <table:table-cell table:style-name="表格110.A2" office:value-type="string">
            <text:p text:style-name="P138"><text:span text:style-name="T32">黏在父節點身上的額外 key</text:span></text:p>
          </table:table-cell>
        </table:table-row>
        <table:table-row table:style-name="表格110.1">
          <table:table-cell table:style-name="表格110.A3" office:value-type="string">
            <text:p text:style-name="P138"><text:span text:style-name="T32">黑色節點</text:span></text:p>
          </table:table-cell>
          <table:table-cell table:style-name="表格110.A3" office:value-type="string">
            <text:p text:style-name="P138"><text:span text:style-name="T32">該 2-3-4 Tree 節點的核心代表節點</text:span></text:p>
          </table:table-cell>
          <table:table-cell table:style-name="表格110.A3" office:value-type="string">
            <text:p text:style-name="P138"><text:span text:style-name="T32">每個 2-3-4 節點的主節點</text:span></text:p>
          </table:table-cell>
        </table:table-row>
      </table:table>
      <text:p text:style-name="P136"><text:s/></text:p>
      <text:h text:style-name="P128" text:outline-level="3"><text:span text:style-name="T55">三種對應的完整圖解</text:span></text:h>
      <table:table table:name="表格111" table:style-name="表格111">
        <table:table-column table:style-name="表格111.A"/>
        <table:table-row table:style-name="表格111.1">
          <table:table-cell table:style-name="表格111.A1" office:value-type="string">
            <text:p text:style-name="P139"><text:span text:style-name="T32">── 2-node ──────────────────────────────────────────</text:span></text:p>
            <text:p text:style-name="P139"><text:span text:style-name="T32">2-3-4 Tree：[50]</text:span></text:p>
            <text:p text:style-name="P139"><text:span text:style-name="T32">RB Tree： <text:s text:c="2"/>50(黑)</text:span></text:p>
            <text:p text:style-name="P139"><text:span text:style-name="T32">解讀：只有一個 key，黑色節點單獨代表整個節點</text:span></text:p>
            <text:p text:style-name="P139"/>
            <text:p text:style-name="P139"><text:span text:style-name="T32">── 3-node ──────────────────────────────────────────</text:span></text:p>
            <text:p text:style-name="P139"><text:span text:style-name="T32">2-3-4 Tree：[30 | 50]</text:span></text:p>
            <text:p text:style-name="P139"><text:span text:style-name="T32">RB Tree（其中一種）：</text:span></text:p>
            <text:p text:style-name="P139"><text:span text:style-name="T32"><text:s text:c="11"/>50(黑)</text:span></text:p>
            <text:p text:style-name="P139"><text:span text:style-name="T32"><text:s text:c="10"/>/</text:span></text:p>
            <text:p text:style-name="P139"><text:span text:style-name="T32"><text:s text:c="7"/>30(紅)</text:span></text:p>
            <text:p text:style-name="P139"><text:span text:style-name="T32">解讀：30(紅) 黏在 50(黑) 上，兩者合起來 = [30|50]</text:span></text:p>
            <text:p text:style-name="P139"><text:span text:style-name="T32"><text:s text:c="6"/>50(黑) 不是「獨立」的，它和 30(紅) 是一組</text:span></text:p>
            <text:p text:style-name="P139"/>
            <text:p text:style-name="P139"><text:span text:style-name="T32">── 4-node ──────────────────────────────────────────</text:span></text:p>
            <text:p text:style-name="P139"><text:span text:style-name="T32">2-3-4 Tree：[20 | 40 | 60]</text:span></text:p>
            <text:p text:style-name="P139"><text:span text:style-name="T32">RB Tree：</text:span></text:p>
            <text:p text:style-name="P139"><text:span text:style-name="T32"><text:s text:c="11"/>40(黑)</text:span></text:p>
            <text:p text:style-name="P139"><text:span text:style-name="T32"><text:s text:c="10"/>/ <text:s text:c="3"/>\</text:span></text:p>
            <text:p text:style-name="P139"><text:span text:style-name="T32"><text:s text:c="7"/>20(紅) <text:s/>60(紅)</text:span></text:p>
            <text:p text:style-name="P139"><text:span text:style-name="T32">解讀：三個節點合起來 = [20|40|60]</text:span></text:p>
            <text:p text:style-name="P139"><text:span text:style-name="T32"><text:s text:c="6"/>40(黑) 是核心代表，20(紅) 和 60(紅) 是額外的 key</text:span></text:p>
          </table:table-cell>
        </table:table-row>
      </table:table>
      <text:p text:style-name="P136"><text:s/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34"><text:span text:style-name="T97">考試最精確的一句話</text:span></text:p>
            <text:p text:style-name="P135"><text:span text:style-name="T28">Red-Black Tree 可視為 2-3-4 Tree 的二元樹表示法。</text:span></text:p>
            <text:p text:style-name="P135"><text:span text:style-name="T28">紅色節點代表它與黑色父節點共同構成同一個 2-3-4 Tree 節點；</text:span></text:p>
            <text:p text:style-name="P135"><text:span text:style-name="T28">黑色節點是每個 2-3-4 Tree 節點的核心代表。</text:span></text:p>
          </table:table-cell>
        </table:table-row>
      </table:table>
      <text:p text:style-name="P140"/>
      <text:h text:style-name="P15" text:outline-level="2">7.3 Red-Black Tree 五條規則</text:h>
      <table:table table:name="表格46" table:style-name="表格46">
        <table:table-column table:style-name="表格46.A"/>
        <table:table-column table:style-name="表格46.B"/>
        <table:table-row table:style-name="表格46.1">
          <table:table-cell table:style-name="表格46.A1" office:value-type="string">
            <text:p text:style-name="P18">規則編號</text:p>
          </table:table-cell>
          <table:table-cell table:style-name="表格46.A1" office:value-type="string">
            <text:p text:style-name="P18">規則內容</text:p>
          </table:table-cell>
        </table:table-row>
        <table:table-row table:style-name="表格46.1">
          <table:table-cell table:style-name="表格46.A2" office:value-type="string">
            <text:p text:style-name="P33">Rule 1</text:p>
          </table:table-cell>
          <table:table-cell table:style-name="表格46.A2" office:value-type="string">
            <text:p text:style-name="P33">每個節點是紅色或黑色</text:p>
          </table:table-cell>
        </table:table-row>
        <table:table-row table:style-name="表格46.1">
          <table:table-cell table:style-name="表格46.A3" office:value-type="string">
            <text:p text:style-name="P33">Rule 2</text:p>
          </table:table-cell>
          <table:table-cell table:style-name="表格46.A3" office:value-type="string">
            <text:p text:style-name="P33">根（root）一定是黑色</text:p>
          </table:table-cell>
        </table:table-row>
        <table:table-row table:style-name="表格46.1">
          <table:table-cell table:style-name="表格46.A2" office:value-type="string">
            <text:p text:style-name="P33">Rule 3</text:p>
          </table:table-cell>
          <table:table-cell table:style-name="表格46.A2" office:value-type="string">
            <text:p text:style-name="P33">每個葉節點（NIL）是黑色</text:p>
          </table:table-cell>
        </table:table-row>
        <table:table-row table:style-name="表格46.1">
          <table:table-cell table:style-name="表格46.A3" office:value-type="string">
            <text:p text:style-name="P33">Rule 4</text:p>
          </table:table-cell>
          <table:table-cell table:style-name="表格46.A3" office:value-type="string">
            <text:p text:style-name="P33">紅色節點的兩個子節點都是黑色（不能有連續紅節點）</text:p>
          </table:table-cell>
        </table:table-row>
        <text:soft-page-break/>
        <table:table-row table:style-name="表格46.1">
          <table:table-cell table:style-name="表格46.A2" office:value-type="string">
            <text:p text:style-name="P33">Rule 5</text:p>
          </table:table-cell>
          <table:table-cell table:style-name="表格46.A2" office:value-type="string">
            <text:p text:style-name="P33">任意節點到其葉節點的所有路徑，黑色節點數相同（Black Height 相等）</text:p>
          </table:table-cell>
        </table:table-row>
      </table:table>
      <text:p text:style-name="P45"><text:s/></text:p>
      <text:p text:style-name="P47"><text:span text:style-name="T24">Rule 5 是關鍵：</text:span><text:span text:style-name="T28">這條規則對應到 2-3-4 Tree 所有葉節點深度相同，確保 Red-Black Tree 保持平衡。</text:span></text:p>
      <text:p text:style-name="P45"><text:s/></text:p>
      <text:h text:style-name="P126" text:outline-level="2"><text:span text:style-name="T94">7.4 為什麼 Red-Black Tree 比 AVL Tree 更常用？</text:span></text:h>
      <table:table table:name="表格47" table:style-name="表格47">
        <table:table-column table:style-name="表格47.A" table:number-columns-repeated="2"/>
        <table:table-row table:style-name="表格47.1">
          <table:table-cell table:style-name="表格47.A1" office:value-type="string">
            <text:p text:style-name="P9">AVL Tree</text:p>
            <text:list text:style-name="WWNum2">
              <text:list-item text:start-value="1">
                <text:p text:style-name="P129">平衡要求嚴格（左右高度差 ≤ 1）</text:p>
              </text:list-item>
              <text:list-item>
                <text:p text:style-name="P129">搜尋速度最快</text:p>
              </text:list-item>
              <text:list-item>
                <text:p text:style-name="P129">插入/刪除時旋轉次數多</text:p>
              </text:list-item>
              <text:list-item>
                <text:p text:style-name="P129">適合搜尋頻繁的場合</text:p>
              </text:list-item>
            </text:list>
          </table:table-cell>
          <table:table-cell table:style-name="表格47.B1" office:value-type="string">
            <text:p text:style-name="P117">Red-Black Tree</text:p>
            <text:list text:continue-numbering="true" text:style-name="WWNum2">
              <text:list-item>
                <text:p text:style-name="P129">平衡要求較寬鬆（最長路徑 ≤ 最短路徑 2 倍）</text:p>
              </text:list-item>
              <text:list-item>
                <text:p text:style-name="P129">搜尋速度略遜 AVL</text:p>
              </text:list-item>
              <text:list-item>
                <text:p text:style-name="P129">插入/刪除旋轉次數少</text:p>
              </text:list-item>
              <text:list-item>
                <text:p text:style-name="P129">適合插入/刪除頻繁的場合</text:p>
              </text:list-item>
            </text:list>
          </table:table-cell>
        </table:table-row>
      </table:table>
      <text:p text:style-name="P48"><text:s/></text:p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2">實務應用（必記）</text:p>
            <text:p text:style-name="P26">Linux Kernel（排程器）→ Red-Black Tree</text:p>
            <text:p text:style-name="P26">Java TreeMap / TreeSet → Red-Black Tree</text:p>
            <text:p text:style-name="P26">C++ std::map / std::set → Red-Black Tree</text:p>
            <text:p text:style-name="P26">資料庫索引 → B-Tree（磁碟儲存）</text:p>
          </table:table-cell>
        </table:table-row>
      </table:table>
      <text:p text:style-name="Standard"/>
      <text:h text:style-name="P14" text:outline-level="1">第八章　B-Tree order 3 插入完整範例（114高Q1）</text:h>
      <text:p text:style-name="P25">B-Tree order 3 = 2-3 Tree。本章補足圖片中未完整解說的考題。</text:p>
      <text:p text:style-name="P25">插入順序：10, 80, 2, 9, 45, 62</text:p>
      <text:p text:style-name="P45"><text:s/></text:p>
      <text:h text:style-name="P6" text:outline-level="3">步驟① 插入 10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32">[10]</text:p>
          </table:table-cell>
        </table:table-row>
      </table:table>
      <text:h text:style-name="P6" text:outline-level="3">步驟② 插入 80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32">[10 | 80] <text:s text:c="3"/>← 合法（2 個 key，order 3 最多 2 key）</text:p>
          </table:table-cell>
        </table:table-row>
      </table:table>
      <text:h text:style-name="P6" text:outline-level="3">步驟③ 插入 2 → Overflow → Split！</text:h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32">插入後：[2 | 10 | 80] <text:s text:c="2"/>← 3 個 key！Overflow！</text:p>
            <text:p text:style-name="P54"/>
            <text:p text:style-name="P32">Split：中間值 10 上推</text:p>
            <text:p text:style-name="P54"/>
            <text:p text:style-name="P32"><text:s text:c="6"/>[10]</text:p>
            <text:p text:style-name="P32"><text:s text:c="5"/>/ <text:s text:c="3"/>\</text:p>
            <text:p text:style-name="P32"><text:s text:c="3"/>[2] <text:s text:c="2"/>[80]</text:p>
          </table:table-cell>
        </table:table-row>
      </table:table>
      <text:h text:style-name="P6" text:outline-level="3">步驟④ 插入 9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32">9 &lt; 10 → 往左子樹</text:p>
            <text:p text:style-name="P32">左子：[2] → 插入 9 → [2 | 9] <text:s text:c="2"/>← 合法</text:p>
            <text:p text:style-name="P54"/>
            <text:p text:style-name="P32"><text:s text:c="6"/>[10]</text:p>
            <text:p text:style-name="P32"><text:s text:c="5"/>/ <text:s text:c="3"/>\</text:p>
            <text:p text:style-name="P32"><text:s text:c="2"/>[2|9] <text:s/>[80]</text:p>
          </table:table-cell>
        </table:table-row>
      </table:table>
      <text:h text:style-name="P6" text:outline-level="3">步驟⑤ 插入 45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32">45 &gt; 10 → 往右子樹</text:p>
            <text:p text:style-name="P32">右子：[80] → 插入 45 → [45 | 80] <text:s text:c="2"/>← 合法</text:p>
            <text:p text:style-name="P54"/>
            <text:p text:style-name="P32"><text:s text:c="6"/>[10]</text:p>
            <text:p text:style-name="P32"><text:s text:c="5"/>/ <text:s text:c="3"/>\</text:p>
            <text:p text:style-name="P32"><text:s text:c="2"/>[2|9] <text:s/>[45|80]</text:p>
          </table:table-cell>
        </table:table-row>
      </table:table>
      <text:h text:style-name="P6" text:outline-level="3">步驟⑥ 插入 62 → Overflow → Split！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32">62 &gt; 10 → 往右子樹</text:p>
            <text:p text:style-name="P32">右子：[45 | 80] → 插入 62 → [45 | 62 | 80] <text:s text:c="2"/>← Overflow！</text:p>
            <text:p text:style-name="P54"/>
            <text:p text:style-name="P32">Split：中間值 62 上推至根 [10]</text:p>
            <text:p text:style-name="P32">根變：[10 | 62] <text:s text:c="2"/>← 合法！</text:p>
            <text:p text:style-name="P54"><text:soft-page-break/></text:p>
            <text:p text:style-name="P32">最終樹：</text:p>
            <text:p text:style-name="P32"><text:s text:c="9"/>[10 | 62]</text:p>
            <text:p text:style-name="P32"><text:s text:c="8"/>/ <text:s text:c="3"/>| <text:s text:c="4"/>\</text:p>
            <text:p text:style-name="P32"><text:s text:c="5"/>[2|9] <text:s/>[45] <text:s/>[80] <text:s text:c="3"/>✅ 完成！</text:p>
          </table:table-cell>
        </table:table-row>
      </table:table>
      <text:p text:style-name="P45"><text:s/></text:p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70">114高Q1 答案驗證</text:p>
            <text:p text:style-name="P26">圖片中記載：root=[10,62]，葉=[2,9],[45],[80]</text:p>
            <text:p text:style-name="P26">與上述推導完全一致。</text:p>
          </table:table-cell>
        </table:table-row>
      </table:table>
      <text:p text:style-name="Standard"/>
      <text:h text:style-name="P14" text:outline-level="1">第九章　AVL Tree 補充說明</text:h>
      <text:h text:style-name="P15" text:outline-level="2">9.1 AVL Tree 的平衡條件</text:h>
      <text:p text:style-name="P25">AVL Tree 規定：每個節點的「平衡因子（Balance Factor）= 左子樹高度 - 右子樹高度」必須在 -1, 0, 1 之內。</text:p>
      <text:p text:style-name="P45"><text:s/></text:p>
      <text:h text:style-name="P15" text:outline-level="2">9.2 四種旋轉類型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row table:style-name="表格56.1">
          <table:table-cell table:style-name="表格56.A1" office:value-type="string">
            <text:p text:style-name="P18">旋轉類型</text:p>
          </table:table-cell>
          <table:table-cell table:style-name="表格56.A1" office:value-type="string">
            <text:p text:style-name="P18">失衡描述</text:p>
          </table:table-cell>
          <table:table-cell table:style-name="表格56.A1" office:value-type="string">
            <text:p text:style-name="P18">旋轉方式</text:p>
          </table:table-cell>
        </table:table-row>
        <table:table-row table:style-name="表格56.1">
          <table:table-cell table:style-name="表格56.A2" office:value-type="string">
            <text:p text:style-name="P33">LL Rotation</text:p>
          </table:table-cell>
          <table:table-cell table:style-name="表格56.A2" office:value-type="string">
            <text:p text:style-name="P33">左子樹的左邊太高</text:p>
          </table:table-cell>
          <table:table-cell table:style-name="表格56.A2" office:value-type="string">
            <text:p text:style-name="P33">對根右旋（Right Rotation）</text:p>
          </table:table-cell>
        </table:table-row>
        <table:table-row table:style-name="表格56.1">
          <table:table-cell table:style-name="表格56.A3" office:value-type="string">
            <text:p text:style-name="P33">RR Rotation</text:p>
          </table:table-cell>
          <table:table-cell table:style-name="表格56.A3" office:value-type="string">
            <text:p text:style-name="P33">右子樹的右邊太高</text:p>
          </table:table-cell>
          <table:table-cell table:style-name="表格56.A3" office:value-type="string">
            <text:p text:style-name="P33">對根左旋（Left Rotation）</text:p>
          </table:table-cell>
        </table:table-row>
        <table:table-row table:style-name="表格56.1">
          <table:table-cell table:style-name="表格56.A2" office:value-type="string">
            <text:p text:style-name="P33">LR Rotation</text:p>
          </table:table-cell>
          <table:table-cell table:style-name="表格56.A2" office:value-type="string">
            <text:p text:style-name="P33">左子樹的右邊太高</text:p>
          </table:table-cell>
          <table:table-cell table:style-name="表格56.A2" office:value-type="string">
            <text:p text:style-name="P33">先對左子左旋，再對根右旋</text:p>
          </table:table-cell>
        </table:table-row>
        <table:table-row table:style-name="表格56.1">
          <table:table-cell table:style-name="表格56.A3" office:value-type="string">
            <text:p text:style-name="P33">RL Rotation</text:p>
          </table:table-cell>
          <table:table-cell table:style-name="表格56.A3" office:value-type="string">
            <text:p text:style-name="P33">右子樹的左邊太高</text:p>
          </table:table-cell>
          <table:table-cell table:style-name="表格56.A3" office:value-type="string">
            <text:p text:style-name="P33">先對右子右旋，再對根左旋</text:p>
          </table:table-cell>
        </table:table-row>
      </table:table>
      <text:p text:style-name="P48"><text:s/></text:p>
      <text:h text:style-name="P15" text:outline-level="2">9.3 AVL vs B-Tree 比較</text:h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32">AVL Tree 維持平衡的方式：旋轉（Rotate）</text:p>
            <text:p text:style-name="P32">B-Tree <text:s/>維持平衡的方式：分裂（Split）+ 合併（Merge）</text:p>
            <text:p text:style-name="P54"/>
            <text:p text:style-name="P32">這是公職考試最常考的比較題！</text:p>
          </table:table-cell>
        </table:table-row>
      </table:table>
      <text:p text:style-name="Standard"/>
      <text:h text:style-name="P14" text:outline-level="1">第十章　考試速查表（最終記憶版）</text:h>
      <text:h text:style-name="P15" text:outline-level="2">10.1 公式速查</text:h>
      <table:table table:name="表格58" table:style-name="表格58">
        <table:table-column table:style-name="表格58.A" table:number-columns-repeated="2"/>
        <table:table-row table:style-name="表格58.1">
          <table:table-cell table:style-name="表格58.A1" office:value-type="string">
            <text:p text:style-name="P18">公式</text:p>
          </table:table-cell>
          <table:table-cell table:style-name="表格58.A1" office:value-type="string">
            <text:p text:style-name="P18">說明</text:p>
          </table:table-cell>
        </table:table-row>
        <table:table-row table:style-name="表格58.1">
          <table:table-cell table:style-name="表格58.A2" office:value-type="string">
            <text:p text:style-name="P33">children 數 = key 數 + 1</text:p>
          </table:table-cell>
          <table:table-cell table:style-name="表格58.A2" office:value-type="string">
            <text:p text:style-name="P33">任何節點皆適用</text:p>
          </table:table-cell>
        </table:table-row>
        <table:table-row table:style-name="表格58.1">
          <table:table-cell table:style-name="表格58.A3" office:value-type="string">
            <text:p text:style-name="P33">B-Tree order m → 最多 m-1 個 key</text:p>
          </table:table-cell>
          <table:table-cell table:style-name="表格58.A3" office:value-type="string">
            <text:p text:style-name="P33">order = children 上限</text:p>
          </table:table-cell>
        </table:table-row>
        <table:table-row table:style-name="表格58.1">
          <table:table-cell table:style-name="表格58.A2" office:value-type="string">
            <text:p text:style-name="P33">非根節點最少 key = ⌈m/2⌉ - 1</text:p>
          </table:table-cell>
          <table:table-cell table:style-name="表格58.A2" office:value-type="string">
            <text:p text:style-name="P33">必考！</text:p>
          </table:table-cell>
        </table:table-row>
        <table:table-row table:style-name="表格58.1">
          <table:table-cell table:style-name="表格58.A3" office:value-type="string">
            <text:p text:style-name="P33">非根節點最少 children = ⌈m/2⌉</text:p>
          </table:table-cell>
          <table:table-cell table:style-name="表格58.A3" office:value-type="string">
            <text:p text:style-name="P33">等於 key+1</text:p>
          </table:table-cell>
        </table:table-row>
        <table:table-row table:style-name="表格58.1">
          <table:table-cell table:style-name="表格58.A2" office:value-type="string">
            <text:p text:style-name="P33">2-3-4 Tree = (2,4)-Tree = order 4</text:p>
          </table:table-cell>
          <table:table-cell table:style-name="表格58.A2" office:value-type="string">
            <text:p text:style-name="P33">必背等價關係</text:p>
          </table:table-cell>
        </table:table-row>
        <table:table-row table:style-name="表格58.1">
          <table:table-cell table:style-name="表格58.A3" office:value-type="string">
            <text:p text:style-name="P33">RB Tree 黑高度 = 2-3-4 Tree 高度</text:p>
          </table:table-cell>
          <table:table-cell table:style-name="表格58.A3" office:value-type="string">
            <text:p text:style-name="P33">對應關係核心</text:p>
          </table:table-cell>
        </table:table-row>
      </table:table>
      <text:p text:style-name="P48"><text:s/></text:p>
      <text:h text:style-name="P15" text:outline-level="2">10.2 三種樹的節點對應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A"/>
        <table:table-row table:style-name="表格59.1">
          <table:table-cell table:style-name="表格59.A1" office:value-type="string">
            <text:p text:style-name="P18">2-3-4 Tree 節點</text:p>
          </table:table-cell>
          <table:table-cell table:style-name="表格59.A1" office:value-type="string">
            <text:p text:style-name="P18">key 數</text:p>
          </table:table-cell>
          <table:table-cell table:style-name="表格59.A1" office:value-type="string">
            <text:p text:style-name="P18">Red-Black Tree</text:p>
          </table:table-cell>
          <table:table-cell table:style-name="表格59.A1" office:value-type="string">
            <text:p text:style-name="P18">備註</text:p>
          </table:table-cell>
        </table:table-row>
        <table:table-row table:style-name="表格59.1">
          <table:table-cell table:style-name="表格59.A2" office:value-type="string">
            <text:p text:style-name="P33">2-node</text:p>
          </table:table-cell>
          <table:table-cell table:style-name="表格59.A2" office:value-type="string">
            <text:p text:style-name="P33">[50]</text:p>
          </table:table-cell>
          <table:table-cell table:style-name="表格59.A2" office:value-type="string">
            <text:p text:style-name="P33">50(黑)</text:p>
          </table:table-cell>
          <table:table-cell table:style-name="表格59.A2" office:value-type="string">
            <text:p text:style-name="P33">最簡單</text:p>
          </table:table-cell>
        </table:table-row>
        <table:table-row table:style-name="表格59.1">
          <table:table-cell table:style-name="表格59.A3" office:value-type="string">
            <text:p text:style-name="P33">3-node</text:p>
          </table:table-cell>
          <table:table-cell table:style-name="表格59.A3" office:value-type="string">
            <text:p text:style-name="P33">[20|50]</text:p>
          </table:table-cell>
          <table:table-cell table:style-name="表格59.A3" office:value-type="string">
            <text:p text:style-name="P33">50(黑)+20(紅)</text:p>
          </table:table-cell>
          <table:table-cell table:style-name="表格59.A3" office:value-type="string">
            <text:p text:style-name="P33">紅節點在左或右均可</text:p>
          </table:table-cell>
        </table:table-row>
        <table:table-row table:style-name="表格59.1">
          <table:table-cell table:style-name="表格59.A2" office:value-type="string">
            <text:p text:style-name="P33">4-node</text:p>
          </table:table-cell>
          <table:table-cell table:style-name="表格59.A2" office:value-type="string">
            <text:p text:style-name="P33">[20|50|80]</text:p>
          </table:table-cell>
          <table:table-cell table:style-name="表格59.A2" office:value-type="string">
            <text:p text:style-name="P33">20(紅)+50(黑)+80(紅)</text:p>
          </table:table-cell>
          <table:table-cell table:style-name="表格59.A2" office:value-type="string">
            <text:p text:style-name="P33">對稱結構</text:p>
          </table:table-cell>
        </table:table-row>
      </table:table>
      <text:p text:style-name="P48"><text:s/></text:p>
      <text:h text:style-name="P15" text:outline-level="2">10.3 插入 vs 刪除 對比</text:h>
      <table:table table:name="表格62" table:style-name="表格62">
        <table:table-column table:style-name="表格62.A" table:number-columns-repeated="2"/>
        <table:table-row table:style-name="表格62.1">
          <table:table-cell table:style-name="表格62.A1" office:value-type="string">
            <text:p text:style-name="P24">插入流程</text:p>
            <table:table table:name="表格60" table:style-name="表格60">
              <table:table-column table:style-name="表格60.A"/>
              <table:table-row table:style-name="表格60.1">
                <table:table-cell table:style-name="表格60.A1" office:value-type="string">
                  <text:p text:style-name="P32">找到位置 → 插入</text:p>
                  <text:p text:style-name="P32">↓</text:p>
                  <text:p text:style-name="P32">節點 key ≤ (m-1)？</text:p>
                  <text:p text:style-name="P32"><text:s text:c="2"/>是 → 結束</text:p>
                  <text:p text:style-name="P32"><text:s text:c="2"/>否（Overflow）→</text:p>
                  <text:p text:style-name="P32"><text:s text:c="4"/>中間 key 上推</text:p>
                  <text:p text:style-name="P32"><text:s text:c="4"/>繼續往上判斷</text:p>
                </table:table-cell>
              </table:table-row>
            </table:table>
            <text:p text:style-name="Standard"/>
          </table:table-cell>
          <table:table-cell table:style-name="表格62.B1" office:value-type="string">
            <text:p text:style-name="P117">刪除流程</text:p>
            <table:table table:name="表格61" table:style-name="表格61">
              <table:table-column table:style-name="表格61.A"/>
              <table:table-row table:style-name="表格61.1">
                <table:table-cell table:style-name="表格61.A1" office:value-type="string">
                  <text:p text:style-name="P32">找到並刪除</text:p>
                  <text:p text:style-name="P32">↓</text:p>
                  <text:p text:style-name="P32">還有 key？</text:p>
                  <text:p text:style-name="P32"><text:s text:c="2"/>是 → 結束</text:p>
                  <text:p text:style-name="P32"><text:s text:c="2"/>否 →</text:p>
                  <text:p text:style-name="P32"><text:s text:c="4"/>能借（Borrow）？</text:p>
                  <text:p text:style-name="P32"><text:s text:c="6"/>是 → 父下兄上</text:p>
                  <text:p text:style-name="P32"><text:s text:c="6"/>否 → Merge</text:p>
                </table:table-cell>
              </table:table-row>
            </table:table>
            <text:p text:style-name="Standard"/>
          </table:table-cell>
        </table:table-row>
      </table:table>
      <text:p text:style-name="P48"><text:s/></text:p>
      <text:h text:style-name="P15" text:outline-level="2">10.4 近年考題分佈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row table:style-name="表格63.1">
          <table:table-cell table:style-name="表格63.A1" office:value-type="string">
            <text:p text:style-name="P18">考試</text:p>
          </table:table-cell>
          <table:table-cell table:style-name="表格63.A1" office:value-type="string">
            <text:p text:style-name="P18">題號</text:p>
          </table:table-cell>
          <table:table-cell table:style-name="表格63.A1" office:value-type="string">
            <text:p text:style-name="P18">考點</text:p>
          </table:table-cell>
        </table:table-row>
        <table:table-row table:style-name="表格63.1">
          <table:table-cell table:style-name="表格63.A2" office:value-type="string">
            <text:p text:style-name="P33">111地特</text:p>
          </table:table-cell>
          <table:table-cell table:style-name="表格63.A2" office:value-type="string">
            <text:p text:style-name="P33">Q3</text:p>
          </table:table-cell>
          <table:table-cell table:style-name="表格63.A2" office:value-type="string">
            <text:p text:style-name="P33">2-3 Tree 插入/刪除</text:p>
          </table:table-cell>
        </table:table-row>
        <table:table-row table:style-name="表格63.1">
          <table:table-cell table:style-name="表格63.A3" office:value-type="string">
            <text:p text:style-name="P33">112高考</text:p>
          </table:table-cell>
          <table:table-cell table:style-name="表格63.A3" office:value-type="string">
            <text:p text:style-name="P33">Q4</text:p>
          </table:table-cell>
          <table:table-cell table:style-name="表格63.A3" office:value-type="string">
            <text:p text:style-name="P33">B-Tree 插入，2-3-4 Tree</text:p>
          </table:table-cell>
        </table:table-row>
        <table:table-row table:style-name="表格63.1">
          <table:table-cell table:style-name="表格63.A2" office:value-type="string">
            <text:p text:style-name="P33">113地特</text:p>
          </table:table-cell>
          <table:table-cell table:style-name="表格63.A2" office:value-type="string">
            <text:p text:style-name="P33">Q4</text:p>
          </table:table-cell>
          <table:table-cell table:style-name="表格63.A2" office:value-type="string">
            <text:p text:style-name="P33">B-Tree 性質，高度計算</text:p>
          </table:table-cell>
        </table:table-row>
        <text:soft-page-break/>
        <table:table-row table:style-name="表格63.1">
          <table:table-cell table:style-name="表格63.A3" office:value-type="string">
            <text:p text:style-name="P33">114高考</text:p>
          </table:table-cell>
          <table:table-cell table:style-name="表格63.A3" office:value-type="string">
            <text:p text:style-name="P33">Q1</text:p>
          </table:table-cell>
          <table:table-cell table:style-name="表格63.A3" office:value-type="string">
            <text:p text:style-name="P33">B-Tree order 3 插入（10,80,2,9,45,62）</text:p>
          </table:table-cell>
        </table:table-row>
      </table:table>
      <text:p text:style-name="P48"><text:s/></text:p>
      <text:h text:style-name="P15" text:outline-level="2">10.5 整體關係圖</text:h>
      <table:table table:name="表格64" table:style-name="表格64">
        <table:table-column table:style-name="表格64.A"/>
        <table:table-row table:style-name="表格64.1">
          <table:table-cell table:style-name="表格64.A1" office:value-type="string">
            <text:p text:style-name="P32">BST（最基礎，但可能退化 O(n)）</text:p>
            <text:p text:style-name="P32"><text:s text:c="2"/>│</text:p>
            <text:p text:style-name="P32"><text:s text:c="2"/>├── AVL Tree（最嚴格旋轉平衡）</text:p>
            <text:p text:style-name="P32"><text:s text:c="2"/>│</text:p>
            <text:p text:style-name="P32"><text:s text:c="2"/>└── m-way Search Tree</text:p>
            <text:p text:style-name="P32"><text:s text:c="7"/>│</text:p>
            <text:p text:style-name="P32"><text:s text:c="7"/>├── 2-3 Tree = B-Tree order 3</text:p>
            <text:p text:style-name="P32"><text:s text:c="7"/>│ <text:s text:c="4"/>插入：Split（中間key上推）</text:p>
            <text:p text:style-name="P32"><text:s text:c="7"/>│ <text:s text:c="4"/>刪除：Borrow / Merge</text:p>
            <text:p text:style-name="P32"><text:s text:c="7"/>│</text:p>
            <text:p text:style-name="P32"><text:s text:c="7"/>├── 2-3-4 Tree = B-Tree order 4 = (2,4)-Tree</text:p>
            <text:p text:style-name="P32"><text:s text:c="7"/>│ <text:s text:c="4"/>↕ 一一對應</text:p>
            <text:p text:style-name="P32"><text:s text:c="7"/>│ <text:s text:c="2"/>Red-Black Tree（用二元樹+顏色表示的2-3-4 Tree）</text:p>
            <text:p text:style-name="P32"><text:s text:c="7"/>│</text:p>
            <text:p text:style-name="P32"><text:s text:c="7"/>└── B-Tree order m（資料庫最愛）</text:p>
            <text:p text:style-name="P32"><text:s text:c="13"/>高度極低，O(log n)，磁碟I/O最少</text:p>
          </table:table-cell>
        </table:table-row>
      </table:table>
      <text:p text:style-name="P48"><text:s/></text:p>
      <text:h text:style-name="P15" text:outline-level="2">10.6 三大必背口訣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22">口訣一：插入</text:p>
            <text:p text:style-name="P26">Overflow → Split → 中間 key 上推 → 繼續往上</text:p>
          </table:table-cell>
        </table:table-row>
      </table:table>
      <text:p text:style-name="P45"><text:s/>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16">口訣二：刪除</text:p>
            <text:p text:style-name="P26">空了 → 先試 Borrow（父下兄上）→ 借不了再 Merge</text:p>
          </table:table-cell>
        </table:table-row>
      </table:table>
      <text:p text:style-name="P45"><text:s/>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125">口訣三：對應關係</text:p>
            <text:p text:style-name="P26">2-3-4 Tree = (2,4)-Tree = B-Tree order 4</text:p>
            <text:p text:style-name="P26">RB Tree 就是 2-3-4 Tree 的二元樹版本</text:p>
            <text:p text:style-name="P26">黑 = 2-node；黑+紅 = 3-node；紅+黑+紅 = 4-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30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34</meta:editing-cycles>
    <meta:creation-date>2026-06-01T00:43:19.219000000</meta:creation-date>
    <dc:date>2026-06-02T08:41:33.521000000</dc:date>
    <meta:generator>MODA_ODF_Application_Tools/3.8.4.2$Windows_X86_64 LibreOffice_project/4fb77107d5af14329e08085efe4fa19b5633383a</meta:generator>
    <meta:editing-duration>PT11H30M28S</meta:editing-duration>
    <meta:document-statistic meta:table-count="112" meta:image-count="0" meta:object-count="0" meta:page-count="30" meta:paragraph-count="949" meta:word-count="8177" meta:character-count="17912" meta:non-whitespace-character-count="12994"/>
  </office:meta>
</office:document-meta>
</file>