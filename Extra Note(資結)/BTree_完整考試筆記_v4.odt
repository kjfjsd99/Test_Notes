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3.173cm"/>
    </style:style>
    <style:style style:name="表格29.B" style:family="table-column">
      <style:table-column-properties style:column-width="6.987cm"/>
    </style:style>
    <style:style style:name="表格29.C" style:family="table-column">
      <style:table-column-properties style:column-width="6.3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35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31" style:family="table">
      <style:table-properties style:width="16.51cm" fo:margin-left="0.035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2" style:family="table">
      <style:table-properties style:width="16.51cm" fo:margin-left="0.035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33" style:family="table">
      <style:table-properties style:width="16.51cm" fo:margin-left="0.035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4" style:family="table">
      <style:table-properties style:width="16.51cm" fo:margin-left="0.035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5" style:family="table">
      <style:table-properties style:width="16.51cm" fo:margin-left="0.035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6" style:family="table">
      <style:table-properties style:width="16.51cm" fo:margin-left="0.035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7" style:family="table">
      <style:table-properties style:width="16.51cm" fo:margin-left="0.035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8" style:family="table">
      <style:table-properties style:width="16.51cm" fo:margin-left="0.035cm" fo:margin-top="0cm" fo:margin-bottom="0cm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9" style:family="table">
      <style:table-properties style:width="16.51cm" fo:margin-left="0.035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4" style:family="paragraph" style:parent-style-name="Standard">
      <style:paragraph-properties fo:margin-top="2.54cm" fo:margin-bottom="0cm" style:contextual-spacing="false"/>
    </style:style>
    <style:style style:name="P5" style:family="paragraph" style:parent-style-name="Standard">
      <style:paragraph-properties fo:margin-top="0.141cm" fo:margin-bottom="0.141cm" style:contextual-spacing="false"/>
    </style:style>
    <style:style style:name="P6" style:family="paragraph" style:parent-style-name="Standard">
      <style:paragraph-properties fo:margin-top="0.035cm" fo:margin-bottom="0.035cm" style:contextual-spacing="false"/>
    </style:style>
    <style:style style:name="P7" style:family="paragraph" style:parent-style-name="Standard">
      <style:paragraph-properties fo:margin-top="0.141cm" fo:margin-bottom="0cm" style:contextual-spacing="false"/>
    </style:style>
    <style:style style:name="P8" style:family="paragraph" style:parent-style-name="Standard">
      <style:paragraph-properties fo:margin-top="0.282cm" fo:margin-bottom="0cm" style:contextual-spacing="false"/>
    </style:style>
    <style:style style:name="P9" style:family="paragraph" style:parent-style-name="Standard">
      <style:paragraph-properties fo:margin-top="0.212cm" fo:margin-bottom="0cm" style:contextual-spacing="false"/>
    </style:style>
    <style:style style:name="P10" style:family="paragraph" style:parent-style-name="Standard">
      <style:paragraph-properties fo:margin-top="0.071cm" fo:margin-bottom="0.071cm" style:contextual-spacing="false"/>
    </style:style>
    <style:style style:name="P1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13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18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19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20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3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24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27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2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3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32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35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47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49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50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51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52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53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54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55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6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5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58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59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6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64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65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6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7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8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9" style:family="text">
      <style:text-properties fo:color="#1a1a1a" loext:opacity="100%" fo:font-size="11pt" fo:background-color="#64ffda" loext:char-shading-value="0" style:font-size-asian="11pt" style:font-size-complex="11pt"/>
    </style:style>
    <style:style style:name="T10" style:family="text">
      <style:text-properties fo:color="#1a1a1a" loext:opacity="100%" fo:font-size="11pt" fo:background-color="#64ffda" loext:char-shading-value="0" style:font-size-asian="11pt" style:font-size-complex="11pt"/>
    </style:style>
    <style:style style:name="T11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2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1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fo:background-color="#ffd740" loext:char-shading-value="0" style:font-weight-asian="bold" style:font-weight-complex="bold"/>
    </style:style>
    <style:style style:name="T17" style:family="text">
      <style:text-properties fo:font-weight="bold" fo:background-color="#c6ff00" loext:char-shading-value="0" style:font-weight-asian="bold" style:font-weight-complex="bold"/>
    </style:style>
    <style:style style:name="T18" style:family="text">
      <style:text-properties fo:font-weight="bold" fo:background-color="#18ffff" loext:char-shading-value="0" style:font-weight-asian="bold" style:font-weight-complex="bold"/>
    </style:style>
    <style:style style:name="T19" style:family="text">
      <style:text-properties fo:font-weight="bold" fo:background-color="#d500f9" loext:char-shading-value="0" style:font-weight-asian="bold" style:font-weight-complex="bold"/>
    </style:style>
    <style:style style:name="T20" style:family="text">
      <style:text-properties fo:font-weight="bold" fo:background-color="#f50057" loext:char-shading-value="0" style:font-weight-asian="bold" style:font-weight-complex="bold"/>
    </style:style>
    <style:style style:name="T21" style:family="text">
      <style:text-properties fo:font-weight="bold" fo:background-color="#ff4081" loext:char-shading-value="0" style:font-weight-asian="bold" style:font-weight-complex="bold"/>
    </style:style>
    <style:style style:name="T2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3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25" style:family="text">
      <style:text-properties fo:color="#18ffff" loext:opacity="100%"/>
    </style:style>
    <style:style style:name="T2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background-color="#d500f9" loext:char-shading-value="0"/>
    </style:style>
    <style:style style:name="T29" style:family="text">
      <style:text-properties fo:color="#18ffff" loext:opacity="100%" fo:background-color="#d500f9" loext:char-shading-value="0"/>
    </style:style>
    <style:style style:name="T30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3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2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3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4" style:family="text">
      <style:text-properties fo:color="#ff3d00" loext:opacity="100%" fo:font-size="11pt" fo:background-color="#64ffda" loext:char-shading-value="0" style:font-size-asian="11pt" style:font-size-complex="11pt"/>
    </style:style>
    <style:style style:name="T35" style:family="text">
      <style:text-properties fo:color="#ff3d00" loext:opacity="100%" fo:font-size="11pt" fo:font-weight="normal" fo:background-color="#64ffda" loext:char-shading-value="0" style:font-size-asian="11pt" style:font-weight-asian="normal" style:font-size-complex="11pt" style:font-weight-complex="normal"/>
    </style:style>
    <style:style style:name="T36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7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3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40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1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4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3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44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48" style:family="text">
      <style:text-properties fo:background-color="#18ffff" loext:char-shading-value="0"/>
    </style:style>
    <style:style style:name="T49" style:family="text">
      <style:text-properties fo:background-color="#18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8">B-Tree + 2-3 Tree + 2-3-4 Tree</text:p>
      <text:p text:style-name="P29">Red-Black Tree 完整對照筆記</text:p>
      <text:p text:style-name="P31">公職考試｜資料結構專用</text:p>
      <text:p text:style-name="P32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3">本筆記涵蓋考點</text:p>
            <text:p text:style-name="P15">111地Q3 <text:s/>· <text:s/>112高Q4 <text:s/>· <text:s/>113地Q4 <text:s/>· <text:s/>114高Q1</text:p>
            <text:p text:style-name="P34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3" text:outline-level="1">第一章　為什麼需要這些樹？BST 的問題</text:h>
      <text:h text:style-name="P11" text:outline-level="2">1.1 普通 BST 的致命缺陷</text:h>
      <text:p text:style-name="P19"><text:span text:style-name="T15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4"><text:s text:c="2"/>10</text:p>
            <text:p text:style-name="P24"><text:s text:c="4"/>\</text:p>
            <text:p text:style-name="P24"><text:s text:c="5"/>20</text:p>
            <text:p text:style-name="P24"><text:s text:c="7"/>\</text:p>
            <text:p text:style-name="P24"><text:s text:c="8"/>30</text:p>
            <text:p text:style-name="P24"><text:s text:c="10"/>\</text:p>
            <text:p text:style-name="P24"><text:s text:c="11"/>40</text:p>
            <text:p text:style-name="P24"><text:s text:c="13"/>\</text:p>
            <text:p text:style-name="P24"><text:s text:c="14"/>50</text:p>
          </table:table-cell>
        </table:table-row>
      </table:table>
      <text:p text:style-name="P19">這種情況稱為「<text:span text:style-name="T22">退化樹（Degenerate Tree）</text:span>」，搜尋時間複雜度退化為 O(n)，與 Linked List 無異。</text:p>
      <text:p text:style-name="P7"><text:s/></text:p>
      <text:h text:style-name="P11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25">BST</text:p>
          </table:table-cell>
          <table:table-cell table:style-name="表格3.A2" office:value-type="string">
            <text:p text:style-name="P25">不自動平衡</text:p>
          </table:table-cell>
          <table:table-cell table:style-name="表格3.A2" office:value-type="string">
            <text:p text:style-name="P25"><text:span text:style-name="T15">O(n)</text:span> <text:span text:style-name="T26">最壞</text:span></text:p>
          </table:table-cell>
          <table:table-cell table:style-name="表格3.A2" office:value-type="string">
            <text:p text:style-name="P25">基礎概念</text:p>
          </table:table-cell>
        </table:table-row>
        <table:table-row table:style-name="表格3.1">
          <table:table-cell table:style-name="表格3.A3" office:value-type="string">
            <text:p text:style-name="P25">AVL Tree</text:p>
          </table:table-cell>
          <table:table-cell table:style-name="表格3.A3" office:value-type="string">
            <text:p text:style-name="P25">旋轉 (LL/RR/LR/RL)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教學用途</text:p>
          </table:table-cell>
        </table:table-row>
        <table:table-row table:style-name="表格3.1">
          <table:table-cell table:style-name="表格3.A2" office:value-type="string">
            <text:p text:style-name="P25">2-3 Tree</text:p>
          </table:table-cell>
          <table:table-cell table:style-name="表格3.A2" office:value-type="string">
            <text:p text:style-name="P25">Split / Borrow / Merge</text:p>
          </table:table-cell>
          <table:table-cell table:style-name="表格3.A2" office:value-type="string">
            <text:p text:style-name="P25">O(<text:span text:style-name="T15">log n</text:span>)</text:p>
          </table:table-cell>
          <table:table-cell table:style-name="表格3.A2" office:value-type="string">
            <text:p text:style-name="P25">B-Tree 基礎</text:p>
          </table:table-cell>
        </table:table-row>
        <table:table-row table:style-name="表格3.1">
          <table:table-cell table:style-name="表格3.A3" office:value-type="string">
            <text:p text:style-name="P25">2-3-4 Tree</text:p>
          </table:table-cell>
          <table:table-cell table:style-name="表格3.A3" office:value-type="string">
            <text:p text:style-name="P25">Split / Borrow / Merge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= B-Tree order 4</text:p>
          </table:table-cell>
        </table:table-row>
        <table:table-row table:style-name="表格3.1">
          <table:table-cell table:style-name="表格3.A2" office:value-type="string">
            <text:p text:style-name="P25">B-Tree (order m)</text:p>
          </table:table-cell>
          <table:table-cell table:style-name="表格3.A2" office:value-type="string">
            <text:p text:style-name="P25">Split / Borrow / Merge</text:p>
          </table:table-cell>
          <table:table-cell table:style-name="表格3.A2" office:value-type="string">
            <text:p text:style-name="P25">O(<text:span text:style-name="T15">log n</text:span>)</text:p>
          </table:table-cell>
          <table:table-cell table:style-name="表格3.A2" office:value-type="string">
            <text:p text:style-name="P25">資料庫索引</text:p>
          </table:table-cell>
        </table:table-row>
        <table:table-row table:style-name="表格3.1">
          <table:table-cell table:style-name="表格3.A3" office:value-type="string">
            <text:p text:style-name="P25">Red-Black Tree</text:p>
          </table:table-cell>
          <table:table-cell table:style-name="表格3.A3" office:value-type="string">
            <text:p text:style-name="P25">顏色標記 + 旋轉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Linux Kernel, Java, C++</text:p>
          </table:table-cell>
        </table:table-row>
      </table:table>
      <text:p text:style-name="P8"><text:s/></text:p>
      <text:p text:style-name="P5"><text:span text:style-name="T12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13" text:outline-level="1">第二章　m-way 搜尋樹定義</text:h>
      <text:h text:style-name="P11" text:outline-level="2">2.1 基本概念</text:h>
      <text:p text:style-name="P19"><text:span text:style-name="T15">普通 BST </text:span>是<text:span text:style-name="T31"> 2-way</text:span> 搜尋樹（<text:span text:style-name="T36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25">BST（2-way）</text:p>
          </table:table-cell>
          <table:table-cell table:style-name="表格4.A2" office:value-type="string">
            <text:p text:style-name="P25">2 個</text:p>
          </table:table-cell>
          <table:table-cell table:style-name="表格4.A2" office:value-type="string">
            <text:p text:style-name="P25">1 個</text:p>
          </table:table-cell>
        </table:table-row>
        <table:table-row table:style-name="表格4.1">
          <table:table-cell table:style-name="表格4.A3" office:value-type="string">
            <text:p text:style-name="P25">2-3 Tree</text:p>
          </table:table-cell>
          <table:table-cell table:style-name="表格4.A3" office:value-type="string">
            <text:p text:style-name="P25">3 個</text:p>
          </table:table-cell>
          <table:table-cell table:style-name="表格4.A3" office:value-type="string">
            <text:p text:style-name="P25">2 個</text:p>
          </table:table-cell>
        </table:table-row>
        <table:table-row table:style-name="表格4.1">
          <table:table-cell table:style-name="表格4.A2" office:value-type="string">
            <text:p text:style-name="P25">2-3-4 Tree</text:p>
          </table:table-cell>
          <table:table-cell table:style-name="表格4.A2" office:value-type="string">
            <text:p text:style-name="P25">4 個</text:p>
          </table:table-cell>
          <table:table-cell table:style-name="表格4.A2" office:value-type="string">
            <text:p text:style-name="P25">3 個</text:p>
          </table:table-cell>
        </table:table-row>
        <table:table-row table:style-name="表格4.1">
          <table:table-cell table:style-name="表格4.A3" office:value-type="string">
            <text:p text:style-name="P25">B-Tree (order m)</text:p>
          </table:table-cell>
          <table:table-cell table:style-name="表格4.A3" office:value-type="string">
            <text:p text:style-name="P25">m 個</text:p>
          </table:table-cell>
          <table:table-cell table:style-name="表格4.A3" office:value-type="string">
            <text:p text:style-name="P25">m-1 個</text:p>
          </table:table-cell>
        </table:table-row>
      </table:table>
      <text:p text:style-name="P9"><text:s/></text:p>
      <text:h text:style-name="P11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5">核心公式（整章只需記這一句）</text:p>
            <text:p text:style-name="P45">children = key + 1</text:p>
            <text:p text:style-name="P10"/>
            <text:p text:style-name="P20">因為<text:span text:style-name="T23">一個 key </text:span>會把空間切成<text:span text:style-name="T23">左右兩塊</text:span>；<text:span text:style-name="T23">兩個 key 切三塊</text:span>；以此類推。</text:p>
          </table:table-cell>
        </table:table-row>
      </table:table>
      <text:p text:style-name="P7"><text:s/></text:p>
      <text:p text:style-name="P19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4">1 個 key： <text:s/>[50]</text:p>
            <text:p text:style-name="P24"><text:s text:c="14"/>↓</text:p>
            <text:p text:style-name="P24"><text:s text:c="10"/>&lt;50 <text:s text:c="3"/>&gt;50</text:p>
            <text:p text:style-name="P24"><text:s text:c="10"/>(左) <text:s text:c="2"/>(右) <text:s text:c="2"/>→ 2 個出口 = 2 個 children</text:p>
            <text:p text:style-name="P6"/>
            <text:p text:style-name="P24">2 個 key： <text:s/>[20 | 50]</text:p>
            <text:p text:style-name="P24"><text:s text:c="17"/>↓</text:p>
            <text:p text:style-name="P24"><text:s text:c="7"/>&lt;20 <text:s text:c="2"/>20~50 <text:s text:c="2"/>&gt;50</text:p>
            <text:p text:style-name="P24"><text:s text:c="7"/>(左) <text:s text:c="2"/>(中) <text:s text:c="2"/>(右) <text:s/>→ 3 個出口 = 3 個 children</text:p>
            <text:p text:style-name="P6"/>
            <text:p text:style-name="P24">3 個 key： <text:s/>[20 | 50 | 80]</text:p>
            <text:p text:style-name="P24"><text:s text:c="20"/>↓</text:p>
            <text:p text:style-name="P24"><text:s text:c="3"/>&lt;20 <text:s/>20~50 <text:s/>50~80 <text:s/>&gt;80</text:p>
            <text:p text:style-name="P24"><text:s text:c="3"/>(1) <text:s text:c="2"/>(2) <text:s text:c="2"/>(3) <text:s text:c="2"/>(4) <text:s/>→ 4 個出口 = 4 個 children</text:p>
          </table:table-cell>
        </table:table-row>
      </table:table>
      <text:p text:style-name="P7"><text:s/></text:p>
      <text:p text:style-name="P19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25">BST</text:p>
          </table:table-cell>
          <table:table-cell table:style-name="表格7.A2" office:value-type="string">
            <text:p text:style-name="P25">最多 2 個出口</text:p>
          </table:table-cell>
          <table:table-cell table:style-name="表格7.A2" office:value-type="string">
            <text:p text:style-name="P25">2</text:p>
          </table:table-cell>
          <table:table-cell table:style-name="表格7.A2" office:value-type="string">
            <text:p text:style-name="P25">1</text:p>
          </table:table-cell>
        </table:table-row>
        <table:table-row table:style-name="表格7.1">
          <table:table-cell table:style-name="表格7.A3" office:value-type="string">
            <text:p text:style-name="P25">2-3 Tree</text:p>
          </table:table-cell>
          <table:table-cell table:style-name="表格7.A3" office:value-type="string">
            <text:p text:style-name="P25">最多 3 個出口</text:p>
          </table:table-cell>
          <table:table-cell table:style-name="表格7.A3" office:value-type="string">
            <text:p text:style-name="P25">3</text:p>
          </table:table-cell>
          <table:table-cell table:style-name="表格7.A3" office:value-type="string">
            <text:p text:style-name="P25">2</text:p>
          </table:table-cell>
        </table:table-row>
        <table:table-row table:style-name="表格7.1">
          <table:table-cell table:style-name="表格7.A2" office:value-type="string">
            <text:p text:style-name="P25">2-3-4 Tree</text:p>
          </table:table-cell>
          <table:table-cell table:style-name="表格7.A2" office:value-type="string">
            <text:p text:style-name="P25">最多 4 個出口</text:p>
          </table:table-cell>
          <table:table-cell table:style-name="表格7.A2" office:value-type="string">
            <text:p text:style-name="P25">4</text:p>
          </table:table-cell>
          <table:table-cell table:style-name="表格7.A2" office:value-type="string">
            <text:p text:style-name="P25">3</text:p>
          </table:table-cell>
        </table:table-row>
        <table:table-row table:style-name="表格7.1">
          <table:table-cell table:style-name="表格7.A3" office:value-type="string">
            <text:p text:style-name="P25">B-Tree (order m)</text:p>
          </table:table-cell>
          <table:table-cell table:style-name="表格7.A3" office:value-type="string">
            <text:p text:style-name="P25">最多 m 個出口</text:p>
          </table:table-cell>
          <table:table-cell table:style-name="表格7.A3" office:value-type="string">
            <text:p text:style-name="P25">m</text:p>
          </table:table-cell>
          <table:table-cell table:style-name="表格7.A3" office:value-type="string">
            <text:p text:style-name="P25">m-1</text:p>
          </table:table-cell>
        </table:table-row>
      </table:table>
      <text:p text:style-name="P7"><text:soft-page-break/><text:s/></text:p>
      <text:p text:style-name="P5"><text:span text:style-name="T14">m-way 的白話翻譯：</text:span><text:span text:style-name="T5"> 老師說『m-way search tree』，腦袋直接換成『最多 m 個出口的搜尋樹』就好，完全不需要記新名詞。</text:span></text:p>
      <text:p text:style-name="P7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8">考試暴力記憶法（只背這三行，其餘全部可以推導）</text:p>
            <text:p text:style-name="P20">2-3 Tree <text:s text:c="2"/>→ 3 個出口 → 最多 2 個 key</text:p>
            <text:p text:style-name="P20">2-3-4 Tree → 4 個出口 → 最多 3 個 key</text:p>
            <text:p text:style-name="P20">B-Tree order m → m 個出口 → 最多 m-1 個 key</text:p>
            <text:p text:style-name="P10"/>
            <text:p text:style-name="P20">其他名詞（m-way、degree、order）全部都是這三行的不同說法而已。</text:p>
          </table:table-cell>
        </table:table-row>
      </table:table>
      <text:p text:style-name="P9"><text:s/></text:p>
      <text:h text:style-name="P11" text:outline-level="2">2.3 節點結構說明</text:h>
      <text:p text:style-name="P19">一個<text:span text:style-name="T16"> degree=m</text:span> 的 <text:span text:style-name="T24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4">節點有：最多 <text:span text:style-name="T15">m-1</text:span> 個<text:span text:style-name="T26">資料（key）</text:span></text:p>
            <text:p text:style-name="P24"><text:s text:c="7"/>最多 <text:span text:style-name="T15">m</text:span> <text:s text:c="2"/>個<text:span text:style-name="T37">子樹（children）</text:span></text:p>
            <text:p text:style-name="P6"/>
            <text:p text:style-name="P24">關係式：<text:span text:style-name="T38">children 數 = key 數 + 1</text:span></text:p>
            <text:p text:style-name="P6"/>
            <text:p text:style-name="P24">例如 m=4：</text:p>
            <text:p text:style-name="P24"><text:s text:c="2"/>[20 | 50 | 80] <text:s text:c="3"/>← <text:span text:style-name="T15">3 個 key</text:span></text:p>
            <text:p text:style-name="P24"><text:s text:c="2"/>/ <text:s text:c="2"/>| <text:s text:c="3"/>| <text:s text:c="2"/>\ <text:s text:c="2"/>← <text:span text:style-name="T15">4 個 children</text:span></text:p>
            <text:p text:style-name="P24"><text:s/>c1 <text:s text:c="2"/>c2 <text:s text:c="2"/>c3 <text:s text:c="2"/>c4</text:p>
          </table:table-cell>
        </table:table-row>
      </table:table>
      <text:p text:style-name="P7"><text:s/></text:p>
      <text:h text:style-name="P12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0">⚠️ 考試重要度提示</text:p>
            <text:p text:style-name="P22">這一節在公職考試的重要度約 10 分，B-Tree 插入刪除才是 90 分的重點。</text:p>
            <text:p text:style-name="P22">看不懂不用恐慌，只需記最後兩行公式即可。</text:p>
          </table:table-cell>
        </table:table-row>
      </table:table>
      <text:p text:style-name="P49"><text:s/></text:p>
      <text:p text:style-name="P50"><text:span text:style-name="T3">概念：</text:span><text:span text:style-name="T5">樹狀結構通常需要 pointer（指標）才能連結節點。但</text:span><text:span text:style-name="T40">陣列表示法完全不用 pointer</text:span><text:span text:style-name="T5">，</text:span><text:span text:style-name="T32">靠「位置計算」就能找到任何子節點</text:span><text:span text:style-name="T5">，原理跟 Binary Heap 一模一樣。</text:span></text:p>
      <text:p text:style-name="P49"><text:s/></text:p>
      <text:h text:style-name="P17" text:outline-level="3">第一步：先從你熟悉的 Binary Heap 理解</text:h>
      <text:p text:style-name="P23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26"><text:s text:c="8"/>10</text:p>
            <text:p text:style-name="P26"><text:s text:c="7"/>/ <text:s/>\</text:p>
            <text:p text:style-name="P26"><text:s text:c="5"/>20 <text:s text:c="3"/>30</text:p>
            <text:p text:style-name="P51"/>
            <text:p text:style-name="P26"><text:s text:c="2"/>a[1]=10 <text:s/>（root）</text:p>
            <text:p text:style-name="P26"><text:s text:c="2"/>a[2]=20 <text:s/>（左孩子）</text:p>
            <text:p text:style-name="P51"><text:soft-page-break/><text:span text:style-name="T11"><text:s text:c="2"/>a[3]=30 <text:s/>（右孩子）</text:span></text:p>
            <text:p text:style-name="P51"/>
            <text:p text:style-name="P26"><text:s text:c="2"/><text:span text:style-name="T26">父節點在 a[i]</text:span> <text:s/>→ <text:span text:style-name="T42"><text:s/>左孩子 a[2i]，右孩子 a[2i+1]</text:span></text:p>
            <text:p text:style-name="P26"><text:s text:c="2"/>（<text:span text:style-name="T36">0-indexed 版本：左孩子 a[2i+1]，右孩子 a[2i+2]</text:span>）</text:p>
          </table:table-cell>
        </table:table-row>
      </table:table>
      <text:p text:style-name="P49"><text:s/></text:p>
      <text:h text:style-name="P17" text:outline-level="3">第二步：m-way Tree 只是把 2 換成 m</text:h>
      <text:p text:style-name="P23"><text:span text:style-name="T43">BST 每個節點最多 2 個孩子，所以用 2×i</text:span>。<text:span text:style-name="T38">m-way Tree 每個節點最多 m 個孩子</text:span>，所以改成<text:span text:style-name="T31"> m×i</text:span>，再加上<text:span text:style-name="T31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26">公式：<text:span text:style-name="T16">第 c 個孩子 </text:span><text:s/>→ <text:s/><text:span text:style-name="T26">a[m×i + c]</text:span></text:p>
            <text:p text:style-name="P51"/>
            <text:p text:style-name="P26"><text:s text:c="2"/><text:span text:style-name="T16">i</text:span> = <text:span text:style-name="T44">該節點在陣列中的 index</text:span></text:p>
            <text:p text:style-name="P26"><text:s text:c="2"/><text:span text:style-name="T16">c</text:span> = <text:span text:style-name="T31">第幾個孩子</text:span>（從 1 開始數）</text:p>
            <text:p text:style-name="P26"><text:s text:c="2"/><text:span text:style-name="T16">m</text:span> = <text:span text:style-name="T38">這棵樹的 order</text:span>（2-3 Tree 就代 m=3，BST 就代 m=2）</text:p>
            <text:p text:style-name="P51"/>
            <text:p text:style-name="P26">代入 <text:span text:style-name="T45">m=2</text:span>（BST）：</text:p>
            <text:p text:style-name="P26"><text:s text:c="2"/><text:span text:style-name="T31">第 1 孩子</text:span> → a[<text:span text:style-name="T45">2</text:span>×i+<text:span text:style-name="T31">1</text:span>] <text:s/>← 和 Heap 的左孩子完全一樣！</text:p>
            <text:p text:style-name="P26"><text:s text:c="2"/><text:span text:style-name="T31">第 2 孩子</text:span> → a[<text:span text:style-name="T45">2</text:span>×i+<text:span text:style-name="T31">2]</text:span> <text:s/>← 和 Heap 的右孩子完全一樣！</text:p>
          </table:table-cell>
        </table:table-row>
      </table:table>
      <text:p text:style-name="P49"><text:s/></text:p>
      <text:h text:style-name="P17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26">範例 A：2-3 Tree（<text:span text:style-name="T45">m=3</text:span>），節點在 a[<text:span text:style-name="T17">2</text:span>]</text:p>
            <text:p text:style-name="P26"><text:s text:c="2"/><text:span text:style-name="T31">第 1 孩子</text:span> → a[<text:span text:style-name="T45">3</text:span>×<text:span text:style-name="T17">2</text:span>+<text:span text:style-name="T31">1</text:span>] = a[7]</text:p>
            <text:p text:style-name="P26"><text:s text:c="2"/><text:span text:style-name="T31">第 2 孩子</text:span> → a[<text:span text:style-name="T45">3</text:span>×<text:span text:style-name="T17">2</text:span>+<text:span text:style-name="T31">2</text:span>] = a[8]</text:p>
            <text:p text:style-name="P26"><text:s text:c="2"/><text:span text:style-name="T31">第 3 孩子</text:span> → a[<text:span text:style-name="T45">3</text:span>×<text:span text:style-name="T17">2</text:span>+<text:span text:style-name="T31">3</text:span>] = a[9]</text:p>
            <text:p text:style-name="P51"/>
            <text:p text:style-name="P26">範例 B（考試常考型）：m=4，節點在 a[3]，第 2 孩子在哪？</text:p>
            <text:p text:style-name="P26"><text:s text:c="2"/>a[4×3+2] = a[14] <text:s text:c="2"/>← 答案就是 a[14]</text:p>
          </table:table-cell>
        </table:table-row>
      </table:table>
      <text:p text:style-name="P49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7">只需記這兩行，其餘全部推導</text:p>
            <text:p text:style-name="P22">root = a[0]</text:p>
            <text:p text:style-name="P22"><text:span text:style-name="T15">第 c 個孩子</text:span> =<text:span text:style-name="T26"> a[m×i + c]</text:span></text:p>
          </table:table-cell>
        </table:table-row>
      </table:table>
      <text:h text:style-name="P48" text:outline-level="2">2.5 搜尋順序規則</text:h>
      <text:p text:style-name="P19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4"><text:s text:c="8"/>[30 | 60]</text:p>
            <text:p text:style-name="P24"><text:s text:c="7"/>/ <text:s text:c="3"/>| <text:s text:c="3"/>\</text:p>
            <text:p text:style-name="P24"><text:s text:c="6"/>/ <text:s text:c="4"/>| <text:s text:c="4"/>\</text:p>
            <text:p text:style-name="P24"><text:s/>(&lt;30) <text:s/>(30~60) <text:s/>(&gt;60)</text:p>
            <text:p text:style-name="P6"/>
            <text:p text:style-name="P24">左子樹：所有值 &lt; 30</text:p>
            <text:p text:style-name="P24">中子樹：30 &lt; 值 &lt; 60</text:p>
            <text:p text:style-name="P24">右子樹：所有值 &gt; 60</text:p>
          </table:table-cell>
        </table:table-row>
      </table:table>
      <text:p text:style-name="Standard"/>
      <text:h text:style-name="P13" text:outline-level="1">第三章　B-Tree 完整定義與重要公式</text:h>
      <text:h text:style-name="P11" text:outline-level="2">3.1 什麼是 B-Tree？</text:h>
      <text:p text:style-name="P19">B-Tree 是一種多路平衡搜尋樹，專為資料庫、檔案系統設計。<text:span text:style-name="T22">每個節點可存放多個 key</text:span>，使<text:span text:style-name="T42">樹的高度極低</text:span>，<text:span text:style-name="T15">大幅減少磁碟 I/O 次數</text:span>。</text:p>
      <text:p text:style-name="P7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6">為什麼資料庫要用 B-Tree？</text:p>
            <text:p text:style-name="P20"><text:span text:style-name="T26">資料庫資料存在硬碟</text:span>，每次存取需要磁碟 I/O（很慢）。</text:p>
            <text:p text:style-name="P20"><text:span text:style-name="T31">AVL Tree 每個節點只存 1 個 key → 高度高</text:span> → I/O 次數多。</text:p>
            <text:p text:style-name="P20"><text:span text:style-name="T38">B-Tree order 100 每個節點可存 99 個 key → 100 萬筆資料高度僅約 3</text:span>。</text:p>
            <text:p text:style-name="P20">高度 3 → 最多只需 3 次磁碟 I/O，效率極高。</text:p>
          </table:table-cell>
        </table:table-row>
      </table:table>
      <text:p text:style-name="P9"><text:s/></text:p>
      <text:h text:style-name="P11" text:outline-level="2">3.2 B-Tree order 的定義（超重要！）</text:h>
      <text:p text:style-name="P5"><text:span text:style-name="T13">B-Tree order m</text:span><text:span text:style-name="T6"> </text:span><text:span text:style-name="T5">的意思是：</text:span><text:span text:style-name="T30">每個節點「最多有 m 個 children」</text:span><text:span text:style-name="T5">（</text:span><text:span text:style-name="T41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6">order = m <text:s/>→ <text:s/>最大 children 數 = m <text:s/>→ <text:s/>最大 key 數 = m-1</text:p>
            <text:p text:style-name="P6"/>
            <text:p text:style-name="P24">常見對照：</text:p>
            <text:p text:style-name="P24"><text:s text:c="2"/>order = <text:span text:style-name="T16">3</text:span> <text:s/>→ <text:s/>2-<text:span text:style-name="T16">3</text:span> Tree <text:s text:c="5"/>（最多 2 key，最多 <text:span text:style-name="T16">3 children</text:span>）</text:p>
            <text:p text:style-name="P24"><text:s text:c="2"/>order = <text:span text:style-name="T16">4</text:span> <text:s/>→ <text:s/>2-3-<text:span text:style-name="T16">4</text:span> Tree <text:s text:c="2"/>（最多 3 key，最多 <text:span text:style-name="T16">4 children</text:span>）</text:p>
            <text:p text:style-name="P24"><text:s text:c="2"/>order = <text:span text:style-name="T16">5</text:span> <text:s/>→ <text:s/>每節點最多 4 key，最多 <text:span text:style-name="T16">5 children</text:span></text:p>
          </table:table-cell>
        </table:table-row>
      </table:table>
      <text:p text:style-name="P7"><text:s/></text:p>
      <text:h text:style-name="P11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28">每節點最多 key 數</text:p>
          </table:table-cell>
          <table:table-cell table:style-name="表格14.A2" office:value-type="string">
            <text:p text:style-name="P27">m - 1</text:p>
          </table:table-cell>
        </table:table-row>
        <table:table-row table:style-name="表格14.1">
          <table:table-cell table:style-name="表格14.A3" office:value-type="string">
            <text:p text:style-name="P25">根節點最少 key 數</text:p>
          </table:table-cell>
          <table:table-cell table:style-name="表格14.A3" office:value-type="string">
            <text:p text:style-name="P25">1（至少有 1 個 key）</text:p>
          </table:table-cell>
        </table:table-row>
        <table:table-row table:style-name="表格14.1">
          <table:table-cell table:style-name="表格14.A2" office:value-type="string">
            <text:p text:style-name="P28">非根節點最少 key 數</text:p>
          </table:table-cell>
          <table:table-cell table:style-name="表格14.A2" office:value-type="string">
            <text:p text:style-name="P47">⌈m/2⌉ - 1</text:p>
          </table:table-cell>
        </table:table-row>
        <table:table-row table:style-name="表格14.1">
          <table:table-cell table:style-name="表格14.A3" office:value-type="string">
            <text:p text:style-name="P28">非根節點最少 children 數</text:p>
          </table:table-cell>
          <table:table-cell table:style-name="表格14.A3" office:value-type="string">
            <text:p text:style-name="P47">⌈m/2⌉</text:p>
          </table:table-cell>
        </table:table-row>
        <table:table-row table:style-name="表格14.1">
          <table:table-cell table:style-name="表格14.A2" office:value-type="string">
            <text:p text:style-name="P25">所有葉節點高度</text:p>
          </table:table-cell>
          <table:table-cell table:style-name="表格14.A2" office:value-type="string">
            <text:p text:style-name="P25">相同（嚴格平衡）</text:p>
          </table:table-cell>
        </table:table-row>
        <table:table-row table:style-name="表格14.1">
          <table:table-cell table:style-name="表格14.A3" office:value-type="string">
            <text:p text:style-name="P25">搜尋時間複雜度</text:p>
          </table:table-cell>
          <table:table-cell table:style-name="表格14.A3" office:value-type="string">
            <text:p text:style-name="P25">O(log n)</text:p>
          </table:table-cell>
        </table:table-row>
        <table:table-row table:style-name="表格14.1">
          <table:table-cell table:style-name="表格14.A2" office:value-type="string">
            <text:p text:style-name="P25">最大 key 數（高度 h）</text:p>
          </table:table-cell>
          <table:table-cell table:style-name="表格14.A2" office:value-type="string">
            <text:p text:style-name="P25">層層×(m-1)累計</text:p>
          </table:table-cell>
        </table:table-row>
      </table:table>
      <text:p text:style-name="P9"><text:s/></text:p>
      <text:h text:style-name="P11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4">公式：<text:span text:style-name="T16">非根節點</text:span><text:span text:style-name="T39">最少</text:span> <text:span text:style-name="T47">key = ⌈m/2⌉ - 1</text:span></text:p>
            <text:p text:style-name="P6"/>
            <text:p text:style-name="P24">範例 1：B-Tree order 5</text:p>
            <text:p text:style-name="P6"><text:soft-page-break/><text:span text:style-name="T11"><text:s text:c="2"/>⌈5/2⌉ - 1 = ⌈2.5⌉ - 1 = 3 - 1 = 2 <text:s/>→ <text:s/>每非根節點至少 2 個 key</text:span></text:p>
            <text:p text:style-name="P6"/>
            <text:p text:style-name="P24">範例 2：B-Tree order 4</text:p>
            <text:p text:style-name="P24"><text:s text:c="2"/>⌈4/2⌉ - 1 = ⌈2⌉ - 1 = 2 - 1 = 1 <text:s text:c="2"/>→ <text:s/>每非根節點至少 1 個 key</text:p>
            <text:p text:style-name="P6"/>
            <text:p text:style-name="P24">範例 3：B-Tree order 6</text:p>
            <text:p text:style-name="P24"><text:s text:c="2"/>⌈6/2⌉ - 1 = ⌈3⌉ - 1 = 3 - 1 = 2 <text:s text:c="2"/>→ <text:s/>每非根節點至少 2 個 key</text:p>
          </table:table-cell>
        </table:table-row>
      </table:table>
      <text:p text:style-name="P7"/>
      <text:h text:style-name="P57" text:outline-level="2">3.4.1 公式這樣來的：不用死背，推導就好</text:h>
      <text:p text:style-name="P52"><text:span text:style-name="T3">核心觀念：</text:span><text:span text:style-name="T8">B-Tree 規定</text:span><text:span text:style-name="T33">非根節點「至少要半滿」</text:span><text:span text:style-name="T5">。知道這句話，公式自然推出來。</text:span></text:p>
      <text:p text:style-name="P53"><text:s/></text:p>
      <text:p text:style-name="P59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60">Step 1：<text:span text:style-name="T27">最多幾個 children？</text:span></text:p>
            <text:p text:style-name="P60"><text:s text:c="8"/><text:span text:style-name="T21">order=5</text:span> <text:s/>→ <text:s/><text:span text:style-name="T46">最多 5 個 children</text:span></text:p>
            <text:p text:style-name="P54"/>
            <text:p text:style-name="P60">Step 2：<text:span text:style-name="T27">至少要半滿，算最少 children</text:span></text:p>
            <text:p text:style-name="P62"><text:s text:c="8"/>5 ÷ 2 = 2.5 <text:s/>→ <text:s/>不能有 2.5 個孩子 <text:s/>→ <text:s/><text:span text:style-name="T46">向上取整 2.5⌉ = 3</text:span></text:p>
            <text:p text:style-name="P60"><text:s text:c="8"/>所以<text:span text:style-name="T46">至少 3 個 children</text:span></text:p>
            <text:p text:style-name="P54"/>
            <text:p text:style-name="P60">Step 3：children 換算成 key（用那條熟悉的公式）</text:p>
            <text:p text:style-name="P60"><text:s text:c="8"/>key = children - 1 = 3 - 1 = 2</text:p>
            <text:p text:style-name="P60"><text:s text:c="8"/>∴ <text:span text:style-name="T46">非根節點至少 2 個 key</text:span> <text:s text:c="2"/>✅</text:p>
          </table:table-cell>
        </table:table-row>
      </table:table>
      <text:p text:style-name="P53"><text:s/></text:p>
      <text:p text:style-name="P64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66">order</text:p>
          </table:table-cell>
          <table:table-cell table:style-name="表格73.A1" office:value-type="string">
            <text:p text:style-name="P66">最多 children</text:p>
          </table:table-cell>
          <table:table-cell table:style-name="表格73.A1" office:value-type="string">
            <text:p text:style-name="P66">至少 children（半滿⌈m/2⌉）</text:p>
          </table:table-cell>
          <table:table-cell table:style-name="表格73.A1" office:value-type="string">
            <text:p text:style-name="P66">至少 key（−1）</text:p>
          </table:table-cell>
        </table:table-row>
        <table:table-row table:style-name="表格73.1">
          <table:table-cell table:style-name="表格73.A2" office:value-type="string">
            <text:p text:style-name="P61">4</text:p>
          </table:table-cell>
          <table:table-cell table:style-name="表格73.A2" office:value-type="string">
            <text:p text:style-name="P61">4 個</text:p>
          </table:table-cell>
          <table:table-cell table:style-name="表格73.A2" office:value-type="string">
            <text:p text:style-name="P63">⌈4/2⌉ = 2 個</text:p>
          </table:table-cell>
          <table:table-cell table:style-name="表格73.A2" office:value-type="string">
            <text:p text:style-name="P61">2−1 = 1 個</text:p>
          </table:table-cell>
        </table:table-row>
        <table:table-row table:style-name="表格73.1">
          <table:table-cell table:style-name="表格73.A3" office:value-type="string">
            <text:p text:style-name="P61">5</text:p>
          </table:table-cell>
          <table:table-cell table:style-name="表格73.A3" office:value-type="string">
            <text:p text:style-name="P61">5 個</text:p>
          </table:table-cell>
          <table:table-cell table:style-name="表格73.A3" office:value-type="string">
            <text:p text:style-name="P61">⌈5/2⌉ = 3 個</text:p>
          </table:table-cell>
          <table:table-cell table:style-name="表格73.A3" office:value-type="string">
            <text:p text:style-name="P61">3−1 = 2 個</text:p>
          </table:table-cell>
        </table:table-row>
        <table:table-row table:style-name="表格73.1">
          <table:table-cell table:style-name="表格73.A2" office:value-type="string">
            <text:p text:style-name="P61">6</text:p>
          </table:table-cell>
          <table:table-cell table:style-name="表格73.A2" office:value-type="string">
            <text:p text:style-name="P61">6 個</text:p>
          </table:table-cell>
          <table:table-cell table:style-name="表格73.A2" office:value-type="string">
            <text:p text:style-name="P61">⌈6/2⌉ = 3 個</text:p>
          </table:table-cell>
          <table:table-cell table:style-name="表格73.A2" office:value-type="string">
            <text:p text:style-name="P61">3−1 = 2 個</text:p>
          </table:table-cell>
        </table:table-row>
        <table:table-row table:style-name="表格73.1">
          <table:table-cell table:style-name="表格73.A3" office:value-type="string">
            <text:p text:style-name="P61">7</text:p>
          </table:table-cell>
          <table:table-cell table:style-name="表格73.A3" office:value-type="string">
            <text:p text:style-name="P61">7 個</text:p>
          </table:table-cell>
          <table:table-cell table:style-name="表格73.A3" office:value-type="string">
            <text:p text:style-name="P61">⌈7/2⌉ = 4 個</text:p>
          </table:table-cell>
          <table:table-cell table:style-name="表格73.A3" office:value-type="string">
            <text:p text:style-name="P61">4−1 = 3 個</text:p>
          </table:table-cell>
        </table:table-row>
      </table:table>
      <text:p text:style-name="P53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67">考場上最快的解題流程（不需要記公式）</text:p>
            <text:p text:style-name="P65">題目問：B-Tree order m，非根節點最少幾個 key？</text:p>
            <text:p text:style-name="P55"/>
            <text:p text:style-name="P65">1. 算至少幾個 children：⌈m/2⌉</text:p>
            <text:p text:style-name="P65">2. 減 1 得 key 數：⌈m/2⌉ − 1</text:p>
            <text:p text:style-name="P55"/>
            <text:p text:style-name="P65">口訣：「先算孩子，再減 1」</text:p>
            <text:p text:style-name="P65">背景邏輯：非根節點至少半滿 <text:s/>→ <text:s/>children ÷ 2 向上取整 <text:s/>→ <text:s/>再減 1</text:p>
          </table:table-cell>
        </table:table-row>
      </table:table>
      <text:p text:style-name="P53"><text:s text:c="2"/></text:p>
      <text:p text:style-name="P7"/>
      <text:h text:style-name="P11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5">重要等價關係（必背！）</text:p>
            <text:p text:style-name="P20">2-3 Tree <text:s text:c="3"/>= B-Tree order 3</text:p>
            <text:p text:style-name="P20">2-3-4 Tree <text:s/>= B-Tree order 4 <text:s/>= (2,4)-Tree</text:p>
            <text:p text:style-name="P20">(2,4)-Tree <text:s/>的意思：每節點有 2 ~ 4 個 children</text:p>
            <text:p text:style-name="P20">Red-Black Tree ≈ 2-3-4 Tree（用二元樹形式表示的 2-3-4 Tree）</text:p>
          </table:table-cell>
        </table:table-row>
      </table:table>
      <text:p text:style-name="Standard"/>
      <text:h text:style-name="P13" text:outline-level="1">第四章　2-3 Tree 插入規則與完整範例</text:h>
      <text:h text:style-name="P11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3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24"><text:s text:c="4"/>[50]</text:p>
                  <text:p text:style-name="P24"><text:s text:c="3"/>/ <text:s text:c="3"/>\</text:p>
                  <text:p text:style-name="P24"><text:s/>(&lt;50) <text:s/>(&gt;50)</text:p>
                </table:table-cell>
              </table:table-row>
            </table:table>
            <text:p text:style-name="P21">只有 1 個 key，有 2 個子樹</text:p>
          </table:table-cell>
          <table:table-cell table:style-name="表格19.B1" office:value-type="string">
            <text:p text:style-name="P39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24"><text:s text:c="2"/>[30 | 60]</text:p>
                  <text:p text:style-name="P24"><text:s/>/ <text:s text:c="3"/>| <text:s text:c="3"/>\</text:p>
                  <text:p text:style-name="P24">(&lt;30)(30-60)(&gt;60)</text:p>
                </table:table-cell>
              </table:table-row>
            </table:table>
            <text:p text:style-name="P21">有 2 個 key，有 3 個子樹</text:p>
          </table:table-cell>
        </table:table-row>
      </table:table>
      <text:p text:style-name="P9"><text:s/></text:p>
      <text:h text:style-name="P11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35">插入流程（牢記）</text:p>
            <text:p text:style-name="P20">Step 1：依照搜尋規則找到正確葉節點</text:p>
            <text:p text:style-name="P20">Step 2：將新值插入該節點</text:p>
            <text:p text:style-name="P20">Step 3：若節點 key 數 ≤ 2 → 合法，結束</text:p>
            <text:p text:style-name="P20">Step 4：若節點有 3 個 key（Overflow）→ 執行 Split</text:p>
            <text:p text:style-name="P20"><text:s text:c="9"/>Split：中間 key 上推至父節點，左右各保留較小/較大 key</text:p>
            <text:p text:style-name="P20">Step 5：父節點若也 Overflow → 繼續往上 Split，直到根</text:p>
            <text:p text:style-name="P20">Step 6：若根節點也 Overflow → 根也 Split，樹高增加 1</text:p>
          </table:table-cell>
        </table:table-row>
      </table:table>
      <text:p text:style-name="P7"><text:s/></text:p>
      <text:h text:style-name="P11" text:outline-level="2">4.3 完整範例：插入 60, 70, 50, 10, 20, 80, 95, 90（112關Q3）</text:h>
      <text:h text:style-name="P16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>[60]</text:p>
          </table:table-cell>
        </table:table-row>
      </table:table>
      <text:h text:style-name="P16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4">[60 | 70] <text:s text:c="2"/>← 仍合法（2 個 key）</text:p>
          </table:table-cell>
        </table:table-row>
      </table:table>
      <text:h text:style-name="P16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4">插入後：[50 | 60 | 70] <text:s text:c="2"/>← 3 個 key！Overflow！</text:p>
            <text:p text:style-name="P6"/>
            <text:p text:style-name="P24">Split：中間值 60 上推</text:p>
            <text:p text:style-name="P6"/>
            <text:p text:style-name="P24"><text:s text:c="5"/>[60]</text:p>
            <text:p text:style-name="P24"><text:s text:c="4"/>/ <text:s text:c="3"/>\</text:p>
            <text:p text:style-name="P24"><text:s text:c="2"/>[50] <text:s/>[70]</text:p>
          </table:table-cell>
        </table:table-row>
      </table:table>
      <text:h text:style-name="P3" text:outline-level="3"><text:soft-page-break/><text:span text:style-name="T2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4">10 &lt; 60 → 往左子樹</text:p>
            <text:p text:style-name="P6"/>
            <text:p text:style-name="P24"><text:s text:c="5"/>[60]</text:p>
            <text:p text:style-name="P24"><text:s text:c="4"/>/ <text:s text:c="3"/>\</text:p>
            <text:p text:style-name="P24"><text:s/>[10|50] [70]</text:p>
          </table:table-cell>
        </table:table-row>
      </table:table>
      <text:h text:style-name="P16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4">20 &lt; 60 → 往左子樹</text:p>
            <text:p text:style-name="P24">左節點變：[10 | 20 | 50] <text:s text:c="2"/>← Overflow！</text:p>
            <text:p text:style-name="P6"/>
            <text:p text:style-name="P24">Split：中間值 20 上推至根</text:p>
            <text:p text:style-name="P6"/>
            <text:p text:style-name="P24"><text:s text:c="7"/>[20 | 60]</text:p>
            <text:p text:style-name="P24"><text:s text:c="6"/>/ <text:s text:c="4"/>| <text:s text:c="3"/>\</text:p>
            <text:p text:style-name="P24"><text:s text:c="3"/>[10] <text:s text:c="2"/>[50] <text:s/>[70]</text:p>
          </table:table-cell>
        </table:table-row>
      </table:table>
      <text:h text:style-name="P16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4">80 &gt; 60 → 往右子樹</text:p>
            <text:p text:style-name="P6"/>
            <text:p text:style-name="P24"><text:s text:c="7"/>[20 | 60]</text:p>
            <text:p text:style-name="P24"><text:s text:c="6"/>/ <text:s text:c="4"/>| <text:s text:c="4"/>\</text:p>
            <text:p text:style-name="P24"><text:s text:c="3"/>[10] <text:s text:c="2"/>[50] <text:s/>[70|80]</text:p>
          </table:table-cell>
        </table:table-row>
      </table:table>
      <text:h text:style-name="P16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4">95 &gt; 60 → 往右子樹</text:p>
            <text:p text:style-name="P24">右節點變：[70 | 80 | 95] <text:s text:c="2"/>← Overflow！</text:p>
            <text:p text:style-name="P6"/>
            <text:p text:style-name="P24">Split：中間值 80 上推至根</text:p>
            <text:p text:style-name="P24">根變：[20 | 60 | 80] <text:s text:c="2"/>← 根也 Overflow！</text:p>
            <text:p text:style-name="P6"/>
            <text:p text:style-name="P24">根 Split：中間值 60 上推，產生新根</text:p>
            <text:p text:style-name="P6"/>
            <text:p text:style-name="P24"><text:s text:c="10"/>[60]</text:p>
            <text:p text:style-name="P24"><text:s text:c="9"/>/ <text:s text:c="3"/>\</text:p>
            <text:p text:style-name="P24"><text:s text:c="6"/>[20] <text:s text:c="3"/>[80]</text:p>
            <text:p text:style-name="P24"><text:s text:c="5"/>/ <text:s text:c="3"/>\ <text:s/>/ <text:s text:c="3"/>\</text:p>
            <text:p text:style-name="P24"><text:s text:c="2"/>[10] [50][70] <text:s/>[95]</text:p>
          </table:table-cell>
        </table:table-row>
      </table:table>
      <text:h text:style-name="P16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4">90 &gt; 60 → 右子樹 [80]</text:p>
            <text:p text:style-name="P24">90 &gt; 80 → 右子樹 [95]</text:p>
            <text:p text:style-name="P24">插入 [95] → [90 | 95] <text:s text:c="2"/>← 合法</text:p>
            <text:p text:style-name="P6"/>
            <text:p text:style-name="P24"><text:s text:c="10"/>[60]</text:p>
            <text:p text:style-name="P6"><text:soft-page-break/><text:span text:style-name="T11"><text:s text:c="9"/>/ <text:s text:c="3"/>\</text:span></text:p>
            <text:p text:style-name="P24"><text:s text:c="6"/>[20] <text:s text:c="3"/>[80]</text:p>
            <text:p text:style-name="P24"><text:s text:c="5"/>/ <text:s text:c="3"/>\ <text:s/>/ <text:s text:c="5"/>\</text:p>
            <text:p text:style-name="P24"><text:s text:c="2"/>[10] [50][70] <text:s/>[90|95] <text:s text:c="2"/>✅ 建立完成！</text:p>
          </table:table-cell>
        </table:table-row>
      </table:table>
      <text:p text:style-name="Standard"/>
      <text:h text:style-name="P13" text:outline-level="1">第五章　2-3 Tree 刪除規則（最難！）</text:h>
      <text:h text:style-name="P11" text:outline-level="2">5.1 刪除三種情況總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4">情況</text:p>
          </table:table-cell>
          <table:table-cell table:style-name="表格29.A1" office:value-type="string">
            <text:p text:style-name="P14">條件</text:p>
          </table:table-cell>
          <table:table-cell table:style-name="表格29.A1" office:value-type="string">
            <text:p text:style-name="P14">做法</text:p>
          </table:table-cell>
        </table:table-row>
        <table:table-row table:style-name="表格29.1">
          <table:table-cell table:style-name="表格29.A2" office:value-type="string">
            <text:p text:style-name="P25">Case 1</text:p>
          </table:table-cell>
          <table:table-cell table:style-name="表格29.A2" office:value-type="string">
            <text:p text:style-name="P25">刪完後節點還有 ≥ 1 個 key</text:p>
          </table:table-cell>
          <table:table-cell table:style-name="表格29.A2" office:value-type="string">
            <text:p text:style-name="P25">直接刪，結束</text:p>
          </table:table-cell>
        </table:table-row>
        <table:table-row table:style-name="表格29.1">
          <table:table-cell table:style-name="表格29.A3" office:value-type="string">
            <text:p text:style-name="P25">Case 2</text:p>
          </table:table-cell>
          <table:table-cell table:style-name="表格29.A3" office:value-type="string">
            <text:p text:style-name="P25">刪完後節點變空，兄弟有多餘 key</text:p>
          </table:table-cell>
          <table:table-cell table:style-name="表格29.A3" office:value-type="string">
            <text:p text:style-name="P25">Borrow（父下兄上）</text:p>
          </table:table-cell>
        </table:table-row>
        <table:table-row table:style-name="表格29.1">
          <table:table-cell table:style-name="表格29.A2" office:value-type="string">
            <text:p text:style-name="P25">Case 3</text:p>
          </table:table-cell>
          <table:table-cell table:style-name="表格29.A2" office:value-type="string">
            <text:p text:style-name="P25">刪完後節點變空，兄弟只有 1 個 key</text:p>
          </table:table-cell>
          <table:table-cell table:style-name="表格29.A2" office:value-type="string">
            <text:p text:style-name="P25">Merge（父 key 下降，合併）</text:p>
          </table:table-cell>
        </table:table-row>
      </table:table>
      <text:p text:style-name="P9"><text:s/></text:p>
      <text:h text:style-name="P11" text:outline-level="2">5.2 Borrow（借）的詳細說明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1">口訣：父下兄上（Parent ↓，Sibling ↑）</text:p>
            <text:p text:style-name="P20">1. 父節點中介於空節點與兄弟之間的 key 下降到空節點</text:p>
            <text:p text:style-name="P20">2. 兄弟中最接近父節點的 key 上升取代父節點的位置</text:p>
            <text:p text:style-name="P10"/>
            <text:p text:style-name="P20">條件：兄弟節點有 2 個 key（才有多餘的可以借）</text:p>
          </table:table-cell>
        </table:table-row>
      </table:table>
      <text:p text:style-name="P7"><text:s/></text:p>
      <text:p text:style-name="P19">範例（從右兄弟借）：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4">刪除前：</text:p>
            <text:p text:style-name="P24"><text:s text:c="7"/>[20]</text:p>
            <text:p text:style-name="P24"><text:s text:c="6"/>/ <text:s text:c="3"/>\</text:p>
            <text:p text:style-name="P24"><text:s text:c="3"/>[10] <text:s/>[50|70]</text:p>
            <text:p text:style-name="P6"/>
            <text:p text:style-name="P24">刪除 10 後，[10] 變空：</text:p>
            <text:p text:style-name="P24"><text:s text:c="7"/>[20]</text:p>
            <text:p text:style-name="P24"><text:s text:c="6"/>/ <text:s text:c="3"/>\</text:p>
            <text:p text:style-name="P24"><text:s text:c="4"/>[] <text:s text:c="2"/>[50|70]</text:p>
            <text:p text:style-name="P6"/>
            <text:p text:style-name="P24">Borrow：父 20 下降，兄弟最小值 50 上升：</text:p>
            <text:p text:style-name="P24"><text:s text:c="7"/>[50]</text:p>
            <text:p text:style-name="P24"><text:s text:c="6"/>/ <text:s text:c="3"/>\</text:p>
            <text:p text:style-name="P24"><text:s text:c="3"/>[20] <text:s text:c="2"/>[70] <text:s text:c="3"/>← 完成！</text:p>
          </table:table-cell>
        </table:table-row>
      </table:table>
      <text:p text:style-name="P7"><text:s/></text:p>
      <text:h text:style-name="P11" text:outline-level="2">5.3 Merge（合併）的詳細說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2">Merge 步驟</text:p>
            <text:p text:style-name="P20">1. 父節點中介於空節點與兄弟之間的 key 下降</text:p>
            <text:p text:style-name="P20">2. 空節點 + 父 key + 兄弟節點 → 合併成一個節點</text:p>
            <text:p text:style-name="P20">3. 若父節點因此也變空 → 繼續往上 Merge（遞迴）</text:p>
          </table:table-cell>
        </table:table-row>
      </table:table>
      <text:p text:style-name="P7"><text:s/></text:p>
      <text:p text:style-name="P19">範例：</text:p>
      <table:table table:name="表格33" table:style-name="表格33">
        <table:table-column table:style-name="表格33.A"/>
        <text:soft-page-break/>
        <table:table-row table:style-name="表格33.1">
          <table:table-cell table:style-name="表格33.A1" office:value-type="string">
            <text:p text:style-name="P24">刪除前：</text:p>
            <text:p text:style-name="P24"><text:s text:c="7"/>[20]</text:p>
            <text:p text:style-name="P24"><text:s text:c="6"/>/ <text:s text:c="3"/>\</text:p>
            <text:p text:style-name="P24"><text:s text:c="3"/>[10] <text:s text:c="2"/>[50]</text:p>
            <text:p text:style-name="P6"/>
            <text:p text:style-name="P24">刪除 50 後，[50] 變空：</text:p>
            <text:p text:style-name="P24"><text:s text:c="7"/>[20]</text:p>
            <text:p text:style-name="P24"><text:s text:c="6"/>/ <text:s text:c="3"/>\</text:p>
            <text:p text:style-name="P24"><text:s text:c="3"/>[10] <text:s text:c="3"/>[]</text:p>
            <text:p text:style-name="P6"/>
            <text:p text:style-name="P24">兄弟 [10] 只有 1 個 key，無法借 → Merge！</text:p>
            <text:p text:style-name="P24">父 20 下降：</text:p>
            <text:p text:style-name="P6"/>
            <text:p text:style-name="P24"><text:s text:c="3"/>[10 | 20] <text:s text:c="3"/>← Merge 完成（樹高降低）</text:p>
          </table:table-cell>
        </table:table-row>
      </table:table>
      <text:p text:style-name="P7"><text:s/></text:p>
      <text:h text:style-name="P11" text:outline-level="2">5.4 刪除內部節點的特殊情況</text:h>
      <text:p text:style-name="P19">若要刪的 key 在內部節點（非葉節點），不能直接刪，需要先找替代值：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4">找「後繼（Successor）」= 右子樹中最小的 key</text:p>
            <text:p text:style-name="P24">或「前驅（Predecessor）」= 左子樹中最大的 key</text:p>
            <text:p text:style-name="P6"/>
            <text:p text:style-name="P24">用替代值取代被刪的 key，然後去葉節點刪掉那個替代值</text:p>
            <text:p text:style-name="P24">（問題轉換成刪除葉節點）</text:p>
          </table:table-cell>
        </table:table-row>
      </table:table>
      <text:p text:style-name="P7"><text:s/></text:p>
      <text:h text:style-name="P11" text:outline-level="2">5.5 完整刪除範例：刪 50 → 刪 20 → 刪 80</text:h>
      <text:p text:style-name="P19">起始樹（第四章建立完成）：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4"><text:s text:c="10"/>[60]</text:p>
            <text:p text:style-name="P24"><text:s text:c="9"/>/ <text:s text:c="3"/>\</text:p>
            <text:p text:style-name="P24"><text:s text:c="6"/>[20] <text:s text:c="3"/>[80]</text:p>
            <text:p text:style-name="P24"><text:s text:c="5"/>/ <text:s text:c="3"/>\ <text:s/>/ <text:s text:c="5"/>\</text:p>
            <text:p text:style-name="P24"><text:s text:c="2"/>[10] [50][70] <text:s/>[90|95]</text:p>
          </table:table-cell>
        </table:table-row>
      </table:table>
      <text:p text:style-name="P7"><text:s/></text:p>
      <text:h text:style-name="P16" text:outline-level="3">刪除 50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4">50 是葉節點，直接刪 → [] 空了</text:p>
            <text:p text:style-name="P6"/>
            <text:p text:style-name="P24">左兄弟 [10]：只有 1 個 key，無法借</text:p>
            <text:p text:style-name="P24">右兄弟 [70]（透過父 60）：只有 1 個 key，無法借</text:p>
            <text:p text:style-name="P6"/>
            <text:p text:style-name="P24">→ Merge！父 20 下降，與 [10] 合併：</text:p>
            <text:p text:style-name="P6"/>
            <text:p text:style-name="P24"><text:s text:c="9"/>[60|80]</text:p>
            <text:p text:style-name="P24"><text:s text:c="8"/>/ <text:s text:c="2"/>| <text:s text:c="3"/>\</text:p>
            <text:p text:style-name="P24"><text:s text:c="3"/>[10|20] [70] <text:s/>[90|95] <text:s text:c="3"/>✅</text:p>
          </table:table-cell>
        </table:table-row>
      </table:table>
      <text:p text:style-name="P7"><text:soft-page-break/><text:s/></text:p>
      <text:h text:style-name="P16" text:outline-level="3">刪除 20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4">目前樹：</text:p>
            <text:p text:style-name="P24"><text:s text:c="9"/>[60|80]</text:p>
            <text:p text:style-name="P24"><text:s text:c="8"/>/ <text:s text:c="2"/>| <text:s text:c="3"/>\</text:p>
            <text:p text:style-name="P24"><text:s text:c="3"/>[10|20] [70] <text:s/>[90|95]</text:p>
            <text:p text:style-name="P6"/>
            <text:p text:style-name="P24">20 是葉節點，直接刪 → [10] 仍有 1 個 key → 合法！</text:p>
            <text:p text:style-name="P6"/>
            <text:p text:style-name="P24"><text:s text:c="9"/>[60|80]</text:p>
            <text:p text:style-name="P24"><text:s text:c="8"/>/ <text:s text:c="2"/>| <text:s text:c="3"/>\</text:p>
            <text:p text:style-name="P24"><text:s text:c="6"/>[10] [70] <text:s/>[90|95] <text:s text:c="3"/>✅</text:p>
          </table:table-cell>
        </table:table-row>
      </table:table>
      <text:p text:style-name="P7"><text:s/></text:p>
      <text:h text:style-name="P16" text:outline-level="3">刪除 80（最複雜！）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4">目前樹：</text:p>
            <text:p text:style-name="P24"><text:s text:c="9"/>[60|80]</text:p>
            <text:p text:style-name="P24"><text:s text:c="8"/>/ <text:s text:c="2"/>| <text:s text:c="3"/>\</text:p>
            <text:p text:style-name="P24"><text:s text:c="6"/>[10] [70] <text:s/>[90|95]</text:p>
            <text:p text:style-name="P6"/>
            <text:p text:style-name="P24">80 是根節點的 key（內部節點），不能直接刪</text:p>
            <text:p text:style-name="P6"/>
            <text:p text:style-name="P24">─── 方法 A（取後繼）───</text:p>
            <text:p text:style-name="P24">後繼 = 右子樹最小值 = 90</text:p>
            <text:p text:style-name="P24">用 90 取代 80：</text:p>
            <text:p text:style-name="P24"><text:s text:c="9"/>[60|90]</text:p>
            <text:p text:style-name="P24"><text:s text:c="8"/>/ <text:s text:c="2"/>| <text:s text:c="3"/>\</text:p>
            <text:p text:style-name="P24"><text:s text:c="6"/>[10] [70] <text:s text:c="2"/>[90|95]</text:p>
            <text:p text:style-name="P24">再刪葉節點 90 → [95]：</text:p>
            <text:p text:style-name="P24"><text:s text:c="9"/>[60|90]</text:p>
            <text:p text:style-name="P24"><text:s text:c="8"/>/ <text:s text:c="2"/>| <text:s text:c="3"/>\</text:p>
            <text:p text:style-name="P24"><text:s text:c="6"/>[10] [70] <text:s text:c="2"/>[95] <text:s text:c="3"/>✅（合法）</text:p>
            <text:p text:style-name="P6"/>
            <text:p text:style-name="P24">─── 方法 B（重整合併，圖片採此版本）───</text:p>
            <text:p text:style-name="P24">刪 80 後根有 [60] 但有 3 個 children → 需要重整</text:p>
            <text:p text:style-name="P24">70 上升為新 root：</text:p>
            <text:p text:style-name="P24"><text:s text:c="7"/>[70]</text:p>
            <text:p text:style-name="P24"><text:s text:c="6"/>/ <text:s text:c="3"/>\</text:p>
            <text:p text:style-name="P24"><text:s text:c="2"/>[10|60] [90|95] <text:s text:c="3"/>✅（圖片最終答案）</text:p>
          </table:table-cell>
        </table:table-row>
      </table:table>
      <text:p text:style-name="P7"><text:s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8">兩種答案都合法！考試如何作答？</text:p>
            <text:p text:style-name="P20">公職考試通常接受兩種答案。</text:p>
            <text:p text:style-name="P20">若圖片/講義有指定版本，照老師版本。</text:p>
            <text:p text:style-name="P20">若題目未指定，方法 B（重整合併）較常見於近年解答。</text:p>
          </table:table-cell>
        </table:table-row>
      </table:table>
      <text:p text:style-name="Standard"/>
      <text:h text:style-name="P13" text:outline-level="1">第六章　2-3-4 Tree 與 (2,4)-Tree</text:h>
      <text:h text:style-name="P11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外觀</text:p>
          </table:table-cell>
        </table:table-row>
        <table:table-row table:style-name="表格40.1">
          <table:table-cell table:style-name="表格40.A2" office:value-type="string">
            <text:p text:style-name="P25">2-node</text:p>
          </table:table-cell>
          <table:table-cell table:style-name="表格40.A2" office:value-type="string">
            <text:p text:style-name="P25">1</text:p>
          </table:table-cell>
          <table:table-cell table:style-name="表格40.A2" office:value-type="string">
            <text:p text:style-name="P25">2</text:p>
          </table:table-cell>
          <table:table-cell table:style-name="表格40.A2" office:value-type="string">
            <text:p text:style-name="P25">[50]</text:p>
          </table:table-cell>
        </table:table-row>
        <table:table-row table:style-name="表格40.1">
          <table:table-cell table:style-name="表格40.A3" office:value-type="string">
            <text:p text:style-name="P25">3-node</text:p>
          </table:table-cell>
          <table:table-cell table:style-name="表格40.A3" office:value-type="string">
            <text:p text:style-name="P25">2</text:p>
          </table:table-cell>
          <table:table-cell table:style-name="表格40.A3" office:value-type="string">
            <text:p text:style-name="P25">3</text:p>
          </table:table-cell>
          <table:table-cell table:style-name="表格40.A3" office:value-type="string">
            <text:p text:style-name="P25">[20|50]</text:p>
          </table:table-cell>
        </table:table-row>
        <table:table-row table:style-name="表格40.1">
          <table:table-cell table:style-name="表格40.A2" office:value-type="string">
            <text:p text:style-name="P25">4-node</text:p>
          </table:table-cell>
          <table:table-cell table:style-name="表格40.A2" office:value-type="string">
            <text:p text:style-name="P25">3</text:p>
          </table:table-cell>
          <table:table-cell table:style-name="表格40.A2" office:value-type="string">
            <text:p text:style-name="P25">4</text:p>
          </table:table-cell>
          <table:table-cell table:style-name="表格40.A2" office:value-type="string">
            <text:p text:style-name="P25">[20|50|80]</text:p>
          </table:table-cell>
        </table:table-row>
      </table:table>
      <text:p text:style-name="P9"><text:s/></text:p>
      <text:h text:style-name="P11" text:outline-level="2">6.2 為什麼叫 (2,4)-Tree？</text:h>
      <text:p text:style-name="P19">名稱來自每個節點的 children 數量範圍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4">children 最少 = 2（2-node 的情況）</text:p>
            <text:p text:style-name="P24">children 最多 = 4（4-node 的情況）</text:p>
            <text:p text:style-name="P6"/>
            <text:p text:style-name="P24">因此：(2,4)-Tree = 2-3-4 Tree = B-Tree order 4</text:p>
          </table:table-cell>
        </table:table-row>
      </table:table>
      <text:p text:style-name="P7"><text:s/></text:p>
      <text:h text:style-name="P11" text:outline-level="2">6.3 插入規則（與 2-3 Tree 相同，只是容量多一格）</text:h>
      <text:p text:style-name="P19">當節點滿（4 個 key，也就是 5 個 children）時才 Overflow，執行 Split，中間 key 上推。</text:p>
      <text:p text:style-name="P7"><text:s/></text:p>
      <text:h text:style-name="P11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44">2-3 Tree vs 2-3-4 Tree</text:p>
            <text:p text:style-name="P20">2-3 Tree：每節點最多 2 個 key，較常分裂</text:p>
            <text:p text:style-name="P20">2-3-4 Tree：每節點最多 3 個 key，分裂次數較少</text:p>
            <text:p text:style-name="P20">2-3-4 Tree 的優點：插入效率更高</text:p>
            <text:p text:style-name="P20">2-3-4 Tree 的缺點：節點空間稍浪費（不一定填滿）</text:p>
            <text:p text:style-name="P20">最重要的是：2-3-4 Tree 是 Red-Black Tree 的理論基礎</text:p>
          </table:table-cell>
        </table:table-row>
      </table:table>
      <text:p text:style-name="Standard"/>
      <text:h text:style-name="P13" text:outline-level="1">第七章　Red-Black Tree 與 2-3-4 Tree 對應</text:h>
      <text:h text:style-name="P11" text:outline-level="2">7.1 為什麼發明 Red-Black Tree？</text:h>
      <text:p text:style-name="P19">2-3-4 Tree 概念好但難實作（一個節點要存 1~3 個 key，程式複雜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2">Red-Black Tree 的核心思想</text:p>
            <text:p text:style-name="P20">我還是用二元樹（每個節點只存 1 個 key）</text:p>
            <text:p text:style-name="P20">但我用「顏色（紅/黑）」來標記節點之間的關係</text:p>
            <text:p text:style-name="P20">紅色節點 = 和父節點「邏輯上是同一個 2-3-4 Tree 節點」</text:p>
            <text:p text:style-name="P20">黑色節點 = 獨立的節點</text:p>
          </table:table-cell>
        </table:table-row>
      </table:table>
      <text:p text:style-name="P9"><text:s/></text:p>
      <text:h text:style-name="P11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25">2-node</text:p>
          </table:table-cell>
          <table:table-cell table:style-name="表格44.A2" office:value-type="string">
            <text:p text:style-name="P25">[50]</text:p>
          </table:table-cell>
          <table:table-cell table:style-name="表格44.A2" office:value-type="string">
            <text:p text:style-name="P25">50(黑)</text:p>
          </table:table-cell>
        </table:table-row>
        <table:table-row table:style-name="表格44.1">
          <table:table-cell table:style-name="表格44.A3" office:value-type="string">
            <text:p text:style-name="P25">3-node（左紅）</text:p>
          </table:table-cell>
          <table:table-cell table:style-name="表格44.A3" office:value-type="string">
            <text:p text:style-name="P25">[20|50]</text:p>
          </table:table-cell>
          <table:table-cell table:style-name="表格44.A3" office:value-type="string">
            <text:p text:style-name="P25">50(黑) 左子 20(紅)</text:p>
          </table:table-cell>
        </table:table-row>
        <table:table-row table:style-name="表格44.1">
          <table:table-cell table:style-name="表格44.A2" office:value-type="string">
            <text:p text:style-name="P25">3-node（右紅）</text:p>
          </table:table-cell>
          <table:table-cell table:style-name="表格44.A2" office:value-type="string">
            <text:p text:style-name="P25">[20|50]</text:p>
          </table:table-cell>
          <table:table-cell table:style-name="表格44.A2" office:value-type="string">
            <text:p text:style-name="P25">20(黑) 右子 50(紅)</text:p>
          </table:table-cell>
        </table:table-row>
        <table:table-row table:style-name="表格44.1">
          <table:table-cell table:style-name="表格44.A3" office:value-type="string">
            <text:p text:style-name="P25">4-node</text:p>
          </table:table-cell>
          <table:table-cell table:style-name="表格44.A3" office:value-type="string">
            <text:p text:style-name="P25">[20|50|80]</text:p>
          </table:table-cell>
          <table:table-cell table:style-name="表格44.A3" office:value-type="string">
            <text:p text:style-name="P25">50(黑) 左子20(紅) 右子80(紅)</text:p>
          </table:table-cell>
        </table:table-row>
      </table:table>
      <text:p text:style-name="P7"><text:s/></text:p>
      <text:p text:style-name="P19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4">2-3-4 Tree： <text:s/>[20 | 50 | 80]</text:p>
            <text:p text:style-name="P6"/>
            <text:p text:style-name="P24">Red-Black Tree：</text:p>
            <text:p text:style-name="P24"><text:s text:c="10"/>50(黑)</text:p>
            <text:p text:style-name="P24"><text:s text:c="9"/>/ <text:s text:c="5"/>\</text:p>
            <text:p text:style-name="P24"><text:s text:c="7"/>20(紅) <text:s text:c="2"/>80(紅)</text:p>
          </table:table-cell>
        </table:table-row>
      </table:table>
      <text:p text:style-name="P7"><text:s/></text:p>
      <text:h text:style-name="P11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25">Rule 1</text:p>
          </table:table-cell>
          <table:table-cell table:style-name="表格46.A2" office:value-type="string">
            <text:p text:style-name="P2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25">Rule 2</text:p>
          </table:table-cell>
          <table:table-cell table:style-name="表格46.A3" office:value-type="string">
            <text:p text:style-name="P25">根（root）一定是黑色</text:p>
          </table:table-cell>
        </table:table-row>
        <table:table-row table:style-name="表格46.1">
          <table:table-cell table:style-name="表格46.A2" office:value-type="string">
            <text:p text:style-name="P25">Rule 3</text:p>
          </table:table-cell>
          <table:table-cell table:style-name="表格46.A2" office:value-type="string">
            <text:p text:style-name="P25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25">Rule 4</text:p>
          </table:table-cell>
          <table:table-cell table:style-name="表格46.A3" office:value-type="string">
            <text:p text:style-name="P2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25">Rule 5</text:p>
          </table:table-cell>
          <table:table-cell table:style-name="表格46.A2" office:value-type="string">
            <text:p text:style-name="P25">任意節點到其葉節點的所有路徑，黑色節點數相同（Black Height 相等）</text:p>
          </table:table-cell>
        </table:table-row>
      </table:table>
      <text:p text:style-name="P7"><text:s/></text:p>
      <text:p text:style-name="P5"><text:span text:style-name="T12">Rule 5 是關鍵：</text:span><text:span text:style-name="T5">這條規則對應到 2-3-4 Tree 所有葉節點深度相同，確保 Red-Black Tree 保持平衡。</text:span></text:p>
      <text:p text:style-name="P7"><text:s/></text:p>
      <text:h text:style-name="P2" text:outline-level="2"><text:soft-page-break/><text:span text:style-name="T4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30">AVL Tree</text:p>
            <text:list text:style-name="WWNum2">
              <text:list-item text:start-value="1">
                <text:p text:style-name="P58">平衡要求嚴格（左右高度差 ≤ 1）</text:p>
              </text:list-item>
              <text:list-item>
                <text:p text:style-name="P58">搜尋速度最快</text:p>
              </text:list-item>
              <text:list-item>
                <text:p text:style-name="P58">插入/刪除時旋轉次數多</text:p>
              </text:list-item>
              <text:list-item>
                <text:p text:style-name="P58">適合搜尋頻繁的場合</text:p>
              </text:list-item>
            </text:list>
          </table:table-cell>
          <table:table-cell table:style-name="表格47.B1" office:value-type="string">
            <text:p text:style-name="P43">Red-Black Tree</text:p>
            <text:list text:continue-numbering="true" text:style-name="WWNum2">
              <text:list-item>
                <text:p text:style-name="P58">平衡要求較寬鬆（最長路徑 ≤ 最短路徑 2 倍）</text:p>
              </text:list-item>
              <text:list-item>
                <text:p text:style-name="P58">搜尋速度略遜 AVL</text:p>
              </text:list-item>
              <text:list-item>
                <text:p text:style-name="P58">插入/刪除旋轉次數少</text:p>
              </text:list-item>
              <text:list-item>
                <text:p text:style-name="P58">適合插入/刪除頻繁的場合</text:p>
              </text:list-item>
            </text:list>
          </table:table-cell>
        </table:table-row>
      </table:table>
      <text:p text:style-name="P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5">實務應用（必記）</text:p>
            <text:p text:style-name="P20">Linux Kernel（排程器）→ Red-Black Tree</text:p>
            <text:p text:style-name="P20">Java TreeMap / TreeSet → Red-Black Tree</text:p>
            <text:p text:style-name="P20">C++ std::map / std::set → Red-Black Tree</text:p>
            <text:p text:style-name="P20">資料庫索引 → B-Tree（磁碟儲存）</text:p>
          </table:table-cell>
        </table:table-row>
      </table:table>
      <text:p text:style-name="Standard"/>
      <text:h text:style-name="P13" text:outline-level="1">第八章　B-Tree order 3 插入完整範例（114高Q1）</text:h>
      <text:p text:style-name="P19">B-Tree order 3 = 2-3 Tree。本章補足圖片中未完整解說的考題。</text:p>
      <text:p text:style-name="P19">插入順序：10, 80, 2, 9, 45, 62</text:p>
      <text:p text:style-name="P7"><text:s/></text:p>
      <text:h text:style-name="P16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4">[10]</text:p>
          </table:table-cell>
        </table:table-row>
      </table:table>
      <text:h text:style-name="P16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4">[10 | 80] <text:s text:c="3"/>← 合法（2 個 key，order 3 最多 2 key）</text:p>
          </table:table-cell>
        </table:table-row>
      </table:table>
      <text:h text:style-name="P16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4">插入後：[2 | 10 | 80] <text:s text:c="2"/>← 3 個 key！Overflow！</text:p>
            <text:p text:style-name="P6"/>
            <text:p text:style-name="P24">Split：中間值 10 上推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3"/>[2] <text:s text:c="2"/>[80]</text:p>
          </table:table-cell>
        </table:table-row>
      </table:table>
      <text:h text:style-name="P16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4">9 &lt; 10 → 往左子樹</text:p>
            <text:p text:style-name="P24">左子：[2] → 插入 9 → [2 | 9] <text:s text:c="2"/>← 合法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2"/>[2|9] <text:s/>[80]</text:p>
          </table:table-cell>
        </table:table-row>
      </table:table>
      <text:h text:style-name="P16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4">45 &gt; 10 → 往右子樹</text:p>
            <text:p text:style-name="P24">右子：[80] → 插入 45 → [45 | 80] <text:s text:c="2"/>← 合法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2"/>[2|9] <text:s/>[45|80]</text:p>
          </table:table-cell>
        </table:table-row>
      </table:table>
      <text:h text:style-name="P16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4">62 &gt; 10 → 往右子樹</text:p>
            <text:p text:style-name="P24">右子：[45 | 80] → 插入 62 → [45 | 62 | 80] <text:s text:c="2"/>← Overflow！</text:p>
            <text:p text:style-name="P6"/>
            <text:p text:style-name="P24">Split：中間值 62 上推至根 [10]</text:p>
            <text:p text:style-name="P24">根變：[10 | 62] <text:s text:c="2"/>← 合法！</text:p>
            <text:p text:style-name="P6"><text:soft-page-break/></text:p>
            <text:p text:style-name="P24">最終樹：</text:p>
            <text:p text:style-name="P24"><text:s text:c="9"/>[10 | 62]</text:p>
            <text:p text:style-name="P24"><text:s text:c="8"/>/ <text:s text:c="3"/>| <text:s text:c="4"/>\</text:p>
            <text:p text:style-name="P24"><text:s text:c="5"/>[2|9] <text:s/>[45] <text:s/>[80] <text:s text:c="3"/>✅ 完成！</text:p>
          </table:table-cell>
        </table:table-row>
      </table:table>
      <text:p text:style-name="P7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41">114高Q1 答案驗證</text:p>
            <text:p text:style-name="P20">圖片中記載：root=[10,62]，葉=[2,9],[45],[80]</text:p>
            <text:p text:style-name="P20">與上述推導完全一致。</text:p>
          </table:table-cell>
        </table:table-row>
      </table:table>
      <text:p text:style-name="Standard"/>
      <text:h text:style-name="P13" text:outline-level="1">第九章　AVL Tree 補充說明</text:h>
      <text:h text:style-name="P11" text:outline-level="2">9.1 AVL Tree 的平衡條件</text:h>
      <text:p text:style-name="P19">AVL Tree 規定：每個節點的「平衡因子（Balance Factor）= 左子樹高度 - 右子樹高度」必須在 -1, 0, 1 之內。</text:p>
      <text:p text:style-name="P7"><text:s/></text:p>
      <text:h text:style-name="P11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25">LL Rotation</text:p>
          </table:table-cell>
          <table:table-cell table:style-name="表格56.A2" office:value-type="string">
            <text:p text:style-name="P25">左子樹的左邊太高</text:p>
          </table:table-cell>
          <table:table-cell table:style-name="表格56.A2" office:value-type="string">
            <text:p text:style-name="P2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25">RR Rotation</text:p>
          </table:table-cell>
          <table:table-cell table:style-name="表格56.A3" office:value-type="string">
            <text:p text:style-name="P25">右子樹的右邊太高</text:p>
          </table:table-cell>
          <table:table-cell table:style-name="表格56.A3" office:value-type="string">
            <text:p text:style-name="P2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25">LR Rotation</text:p>
          </table:table-cell>
          <table:table-cell table:style-name="表格56.A2" office:value-type="string">
            <text:p text:style-name="P25">左子樹的右邊太高</text:p>
          </table:table-cell>
          <table:table-cell table:style-name="表格56.A2" office:value-type="string">
            <text:p text:style-name="P2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25">RL Rotation</text:p>
          </table:table-cell>
          <table:table-cell table:style-name="表格56.A3" office:value-type="string">
            <text:p text:style-name="P25">右子樹的左邊太高</text:p>
          </table:table-cell>
          <table:table-cell table:style-name="表格56.A3" office:value-type="string">
            <text:p text:style-name="P25">先對右子右旋，再對根左旋</text:p>
          </table:table-cell>
        </table:table-row>
      </table:table>
      <text:p text:style-name="P9"><text:s/></text:p>
      <text:h text:style-name="P11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4">AVL Tree 維持平衡的方式：旋轉（Rotate）</text:p>
            <text:p text:style-name="P24">B-Tree <text:s/>維持平衡的方式：分裂（Split）+ 合併（Merge）</text:p>
            <text:p text:style-name="P6"/>
            <text:p text:style-name="P24">這是公職考試最常考的比較題！</text:p>
          </table:table-cell>
        </table:table-row>
      </table:table>
      <text:p text:style-name="Standard"/>
      <text:h text:style-name="P13" text:outline-level="1">第十章　考試速查表（最終記憶版）</text:h>
      <text:h text:style-name="P11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25">children 數 = key 數 + 1</text:p>
          </table:table-cell>
          <table:table-cell table:style-name="表格58.A2" office:value-type="string">
            <text:p text:style-name="P25">任何節點皆適用</text:p>
          </table:table-cell>
        </table:table-row>
        <table:table-row table:style-name="表格58.1">
          <table:table-cell table:style-name="表格58.A3" office:value-type="string">
            <text:p text:style-name="P25">B-Tree order m → 最多 m-1 個 key</text:p>
          </table:table-cell>
          <table:table-cell table:style-name="表格58.A3" office:value-type="string">
            <text:p text:style-name="P25">order = children 上限</text:p>
          </table:table-cell>
        </table:table-row>
        <table:table-row table:style-name="表格58.1">
          <table:table-cell table:style-name="表格58.A2" office:value-type="string">
            <text:p text:style-name="P25">非根節點最少 key = ⌈m/2⌉ - 1</text:p>
          </table:table-cell>
          <table:table-cell table:style-name="表格58.A2" office:value-type="string">
            <text:p text:style-name="P25">必考！</text:p>
          </table:table-cell>
        </table:table-row>
        <table:table-row table:style-name="表格58.1">
          <table:table-cell table:style-name="表格58.A3" office:value-type="string">
            <text:p text:style-name="P25">非根節點最少 children = ⌈m/2⌉</text:p>
          </table:table-cell>
          <table:table-cell table:style-name="表格58.A3" office:value-type="string">
            <text:p text:style-name="P25">等於 key+1</text:p>
          </table:table-cell>
        </table:table-row>
        <table:table-row table:style-name="表格58.1">
          <table:table-cell table:style-name="表格58.A2" office:value-type="string">
            <text:p text:style-name="P25">2-3-4 Tree = (2,4)-Tree = order 4</text:p>
          </table:table-cell>
          <table:table-cell table:style-name="表格58.A2" office:value-type="string">
            <text:p text:style-name="P25">必背等價關係</text:p>
          </table:table-cell>
        </table:table-row>
        <table:table-row table:style-name="表格58.1">
          <table:table-cell table:style-name="表格58.A3" office:value-type="string">
            <text:p text:style-name="P25">RB Tree 黑高度 = 2-3-4 Tree 高度</text:p>
          </table:table-cell>
          <table:table-cell table:style-name="表格58.A3" office:value-type="string">
            <text:p text:style-name="P25">對應關係核心</text:p>
          </table:table-cell>
        </table:table-row>
      </table:table>
      <text:p text:style-name="P9"><text:s/></text:p>
      <text:h text:style-name="P11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25">2-node</text:p>
          </table:table-cell>
          <table:table-cell table:style-name="表格59.A2" office:value-type="string">
            <text:p text:style-name="P25">[50]</text:p>
          </table:table-cell>
          <table:table-cell table:style-name="表格59.A2" office:value-type="string">
            <text:p text:style-name="P25">50(黑)</text:p>
          </table:table-cell>
          <table:table-cell table:style-name="表格59.A2" office:value-type="string">
            <text:p text:style-name="P25">最簡單</text:p>
          </table:table-cell>
        </table:table-row>
        <table:table-row table:style-name="表格59.1">
          <table:table-cell table:style-name="表格59.A3" office:value-type="string">
            <text:p text:style-name="P25">3-node</text:p>
          </table:table-cell>
          <table:table-cell table:style-name="表格59.A3" office:value-type="string">
            <text:p text:style-name="P25">[20|50]</text:p>
          </table:table-cell>
          <table:table-cell table:style-name="表格59.A3" office:value-type="string">
            <text:p text:style-name="P25">50(黑)+20(紅)</text:p>
          </table:table-cell>
          <table:table-cell table:style-name="表格59.A3" office:value-type="string">
            <text:p text:style-name="P25">紅節點在左或右均可</text:p>
          </table:table-cell>
        </table:table-row>
        <table:table-row table:style-name="表格59.1">
          <table:table-cell table:style-name="表格59.A2" office:value-type="string">
            <text:p text:style-name="P25">4-node</text:p>
          </table:table-cell>
          <table:table-cell table:style-name="表格59.A2" office:value-type="string">
            <text:p text:style-name="P25">[20|50|80]</text:p>
          </table:table-cell>
          <table:table-cell table:style-name="表格59.A2" office:value-type="string">
            <text:p text:style-name="P25">20(紅)+50(黑)+80(紅)</text:p>
          </table:table-cell>
          <table:table-cell table:style-name="表格59.A2" office:value-type="string">
            <text:p text:style-name="P25">對稱結構</text:p>
          </table:table-cell>
        </table:table-row>
      </table:table>
      <text:p text:style-name="P9"><text:s/></text:p>
      <text:h text:style-name="P11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6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24">找到位置 → 插入</text:p>
                  <text:p text:style-name="P24">↓</text:p>
                  <text:p text:style-name="P24">節點 key ≤ (m-1)？</text:p>
                  <text:p text:style-name="P24"><text:s text:c="2"/>是 → 結束</text:p>
                  <text:p text:style-name="P24"><text:s text:c="2"/>否（Overflow）→</text:p>
                  <text:p text:style-name="P24"><text:s text:c="4"/>中間 key 上推</text:p>
                  <text:p text:style-name="P24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43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24">找到並刪除</text:p>
                  <text:p text:style-name="P24">↓</text:p>
                  <text:p text:style-name="P24">還有 key？</text:p>
                  <text:p text:style-name="P24"><text:s text:c="2"/>是 → 結束</text:p>
                  <text:p text:style-name="P24"><text:s text:c="2"/>否 →</text:p>
                  <text:p text:style-name="P24"><text:s text:c="4"/>能借（Borrow）？</text:p>
                  <text:p text:style-name="P24"><text:s text:c="6"/>是 → 父下兄上</text:p>
                  <text:p text:style-name="P24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9"><text:s/></text:p>
      <text:h text:style-name="P11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25">111地特</text:p>
          </table:table-cell>
          <table:table-cell table:style-name="表格63.A2" office:value-type="string">
            <text:p text:style-name="P25">Q3</text:p>
          </table:table-cell>
          <table:table-cell table:style-name="表格63.A2" office:value-type="string">
            <text:p text:style-name="P25">2-3 Tree 插入/刪除</text:p>
          </table:table-cell>
        </table:table-row>
        <table:table-row table:style-name="表格63.1">
          <table:table-cell table:style-name="表格63.A3" office:value-type="string">
            <text:p text:style-name="P25">112高考</text:p>
          </table:table-cell>
          <table:table-cell table:style-name="表格63.A3" office:value-type="string">
            <text:p text:style-name="P25">Q4</text:p>
          </table:table-cell>
          <table:table-cell table:style-name="表格63.A3" office:value-type="string">
            <text:p text:style-name="P25">B-Tree 插入，2-3-4 Tree</text:p>
          </table:table-cell>
        </table:table-row>
        <table:table-row table:style-name="表格63.1">
          <table:table-cell table:style-name="表格63.A2" office:value-type="string">
            <text:p text:style-name="P25">113地特</text:p>
          </table:table-cell>
          <table:table-cell table:style-name="表格63.A2" office:value-type="string">
            <text:p text:style-name="P25">Q4</text:p>
          </table:table-cell>
          <table:table-cell table:style-name="表格63.A2" office:value-type="string">
            <text:p text:style-name="P25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25">114高考</text:p>
          </table:table-cell>
          <table:table-cell table:style-name="表格63.A3" office:value-type="string">
            <text:p text:style-name="P25">Q1</text:p>
          </table:table-cell>
          <table:table-cell table:style-name="表格63.A3" office:value-type="string">
            <text:p text:style-name="P25">B-Tree order 3 插入（10,80,2,9,45,62）</text:p>
          </table:table-cell>
        </table:table-row>
      </table:table>
      <text:p text:style-name="P9"><text:s/></text:p>
      <text:h text:style-name="P11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24">BST（最基礎，但可能退化 O(n)）</text:p>
            <text:p text:style-name="P24"><text:s text:c="2"/>│</text:p>
            <text:p text:style-name="P24"><text:s text:c="2"/>├── AVL Tree（最嚴格旋轉平衡）</text:p>
            <text:p text:style-name="P24"><text:s text:c="2"/>│</text:p>
            <text:p text:style-name="P24"><text:s text:c="2"/>└── m-way Search Tree</text:p>
            <text:p text:style-name="P24"><text:s text:c="7"/>│</text:p>
            <text:p text:style-name="P24"><text:s text:c="7"/>├── 2-3 Tree = B-Tree order 3</text:p>
            <text:p text:style-name="P24"><text:s text:c="7"/>│ <text:s text:c="4"/>插入：Split（中間key上推）</text:p>
            <text:p text:style-name="P24"><text:s text:c="7"/>│ <text:s text:c="4"/>刪除：Borrow / Merge</text:p>
            <text:p text:style-name="P24"><text:s text:c="7"/>│</text:p>
            <text:p text:style-name="P24"><text:s text:c="7"/>├── 2-3-4 Tree = B-Tree order 4 = (2,4)-Tree</text:p>
            <text:p text:style-name="P24"><text:s text:c="7"/>│ <text:s text:c="4"/>↕ 一一對應</text:p>
            <text:p text:style-name="P24"><text:s text:c="7"/>│ <text:s text:c="2"/>Red-Black Tree（用二元樹+顏色表示的2-3-4 Tree）</text:p>
            <text:p text:style-name="P24"><text:s text:c="7"/>│</text:p>
            <text:p text:style-name="P24"><text:s text:c="7"/>└── B-Tree order m（資料庫最愛）</text:p>
            <text:p text:style-name="P24"><text:s text:c="13"/>高度極低，O(log n)，磁碟I/O最少</text:p>
          </table:table-cell>
        </table:table-row>
      </table:table>
      <text:p text:style-name="P9"><text:s/></text:p>
      <text:h text:style-name="P11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35">口訣一：插入</text:p>
            <text:p text:style-name="P20">Overflow → Split → 中間 key 上推 → 繼續往上</text:p>
          </table:table-cell>
        </table:table-row>
      </table:table>
      <text:p text:style-name="P7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42">口訣二：刪除</text:p>
            <text:p text:style-name="P20">空了 → 先試 Borrow（父下兄上）→ 借不了再 Merge</text:p>
          </table:table-cell>
        </table:table-row>
      </table:table>
      <text:p text:style-name="P7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44">口訣三：對應關係</text:p>
            <text:p text:style-name="P20">2-3-4 Tree = (2,4)-Tree = B-Tree order 4</text:p>
            <text:p text:style-name="P20">RB Tree 就是 2-3-4 Tree 的二元樹版本</text:p>
            <text:p text:style-name="P20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4</meta:editing-cycles>
    <meta:creation-date>2026-06-01T00:43:19.219000000</meta:creation-date>
    <dc:date>2026-06-01T16:20:13.268000000</dc:date>
    <meta:generator>MODA_ODF_Application_Tools/3.8.4.2$Windows_X86_64 LibreOffice_project/4fb77107d5af14329e08085efe4fa19b5633383a</meta:generator>
    <meta:editing-duration>PT7H32M32S</meta:editing-duration>
    <meta:document-statistic meta:table-count="74" meta:image-count="0" meta:object-count="0" meta:page-count="22" meta:paragraph-count="722" meta:word-count="5479" meta:character-count="11935" meta:non-whitespace-character-count="9035"/>
  </office:meta>
</office:document-meta>
</file>