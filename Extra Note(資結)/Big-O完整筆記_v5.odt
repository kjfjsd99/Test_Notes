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5.886cm" fo:margin-left="0.002cm" fo:margin-top="0cm" fo:margin-bottom="0cm" table:align="left" style:writing-mode="page"/>
    </style:style>
    <style:style style:name="表格1.A" style:family="table-column">
      <style:table-column-properties style:column-width="3.175cm"/>
    </style:style>
    <style:style style:name="表格1.B" style:family="table-column">
      <style:table-column-properties style:column-width="3.35cm"/>
    </style:style>
    <style:style style:name="表格1.C" style:family="table-column">
      <style:table-column-properties style:column-width="9.36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.A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.B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.A3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.A5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.A6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.A7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2" style:family="table">
      <style:table-properties style:width="15.886cm" fo:margin-left="0.002cm" fo:margin-top="0cm" fo:margin-bottom="0cm" table:align="left" style:writing-mode="page"/>
    </style:style>
    <style:style style:name="表格2.A" style:family="table-column">
      <style:table-column-properties style:column-width="6.348cm"/>
    </style:style>
    <style:style style:name="表格2.B" style:family="table-column">
      <style:table-column-properties style:column-width="4.939cm"/>
    </style:style>
    <style:style style:name="表格2.C" style:family="table-column">
      <style:table-column-properties style:column-width="4.59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0d9488" fo:padding-left="0.265cm" fo:padding-right="0.265cm" fo:padding-top="0.176cm" fo:padding-bottom="0.176cm" fo:border="0.1pt solid #0d9488">
        <style:background-image/>
      </style:table-cell-properties>
    </style:style>
    <style:style style:name="表格2.A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2.B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2.C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2.C3" style:family="table-cell">
      <style:table-cell-properties style:vertical-align="middle"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2.C5" style:family="table-cell">
      <style:table-cell-properties style:vertical-align="middle"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2.C7" style:family="table-cell">
      <style:table-cell-properties style:vertical-align="middle"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1" style:family="table">
      <style:table-properties style:width="15.886cm" fo:margin-left="0.002cm" fo:margin-top="0cm" fo:margin-bottom="0cm" table:align="left" style:writing-mode="page"/>
    </style:style>
    <style:style style:name="表格11.A" style:family="table-column">
      <style:table-column-properties style:column-width="2.822cm"/>
    </style:style>
    <style:style style:name="表格11.B" style:family="table-column">
      <style:table-column-properties style:column-width="4.586cm"/>
    </style:style>
    <style:style style:name="表格11.C" style:family="table-column">
      <style:table-column-properties style:column-width="4.232cm"/>
    </style:style>
    <style:style style:name="表格11.D" style:family="table-column">
      <style:table-column-properties style:column-width="4.246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a580c" fo:padding-left="0.265cm" fo:padding-right="0.265cm" fo:padding-top="0.176cm" fo:padding-bottom="0.176cm" fo:border="0.1pt solid #ea580c">
        <style:background-image/>
      </style:table-cell-properties>
    </style:style>
    <style:style style:name="表格11.A2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1.B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11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1.A5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0" style:family="table">
      <style:table-properties style:width="15.886cm" fo:margin-left="0.002cm" fo:margin-top="0cm" fo:margin-bottom="0cm" table:align="left" style:writing-mode="page"/>
    </style:style>
    <style:style style:name="表格10.A" style:family="table-column">
      <style:table-column-properties style:column-width="4.586cm"/>
    </style:style>
    <style:style style:name="表格10.B" style:family="table-column">
      <style:table-column-properties style:column-width="5.29cm"/>
    </style:style>
    <style:style style:name="表格10.C" style:family="table-column">
      <style:table-column-properties style:column-width="6.0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0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0.B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0.A3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0.A4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3" style:family="table">
      <style:table-properties style:width="15.886cm" fo:margin-left="0.002cm" fo:margin-top="0cm" fo:margin-bottom="0cm" table:align="left" style:writing-mode="page"/>
    </style:style>
    <style:style style:name="表格3.A" style:family="table-column">
      <style:table-column-properties style:column-width="7.94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0fdfa" fo:padding-left="0.353cm" fo:padding-right="0.353cm" fo:padding-top="0.265cm" fo:padding-bottom="0.265cm" fo:border="0.1pt solid #0d9488">
        <style:background-image/>
      </style:table-cell-properties>
    </style:style>
    <style:style style:name="表格3.B1" style:family="table-cell">
      <style:table-cell-properties fo:background-color="#fef2f2" fo:padding-left="0.353cm" fo:padding-right="0.353cm" fo:padding-top="0.265cm" fo:padding-bottom="0.265cm" fo:border="0.1pt solid #dc2626">
        <style:background-image/>
      </style:table-cell-properties>
    </style:style>
    <style:style style:name="表格12" style:family="table">
      <style:table-properties style:width="15.886cm" fo:margin-left="0.002cm" fo:margin-top="0cm" fo:margin-bottom="0cm" table:align="left" style:writing-mode="page"/>
    </style:style>
    <style:style style:name="表格12.A" style:family="table-column">
      <style:table-column-properties style:column-width="7.94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0fdfa" fo:padding-left="0.353cm" fo:padding-right="0.353cm" fo:padding-top="0.265cm" fo:padding-bottom="0.265cm" fo:border="0.1pt solid #0d9488">
        <style:background-image/>
      </style:table-cell-properties>
    </style:style>
    <style:style style:name="表格12.B1" style:family="table-cell">
      <style:table-cell-properties fo:background-color="#fef2f2" fo:padding-left="0.353cm" fo:padding-right="0.353cm" fo:padding-top="0.265cm" fo:padding-bottom="0.265cm" fo:border="0.1pt solid #dc2626">
        <style:background-image/>
      </style:table-cell-properties>
    </style:style>
    <style:style style:name="表格13" style:family="table">
      <style:table-properties style:width="15.886cm" fo:margin-left="0.002cm" fo:margin-top="0cm" fo:margin-bottom="0cm" table:align="left" style:writing-mode="page"/>
    </style:style>
    <style:style style:name="表格13.A" style:family="table-column">
      <style:table-column-properties style:column-width="4.233cm"/>
    </style:style>
    <style:style style:name="表格13.B" style:family="table-column">
      <style:table-column-properties style:column-width="3.528cm"/>
    </style:style>
    <style:style style:name="表格13.C" style:family="table-column">
      <style:table-column-properties style:column-width="3.526cm"/>
    </style:style>
    <style:style style:name="表格13.D" style:family="table-column">
      <style:table-column-properties style:column-width="4.59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3.A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3.D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3.A3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3.D3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4" style:family="table">
      <style:table-properties style:width="15.886cm" fo:margin-left="0.002cm" fo:margin-top="0cm" fo:margin-bottom="0cm" table:align="left" style:writing-mode="page"/>
    </style:style>
    <style:style style:name="表格4.A" style:family="table-column">
      <style:table-column-properties style:column-width="3.528cm"/>
    </style:style>
    <style:style style:name="表格4.B" style:family="table-column">
      <style:table-column-properties style:column-width="3.526cm"/>
    </style:style>
    <style:style style:name="表格4.D" style:family="table-column">
      <style:table-column-properties style:column-width="5.304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4.A2" style:family="table-cell">
      <style:table-cell-properties fo:background-color="#f0fdf4" fo:padding-left="0.265cm" fo:padding-right="0.265cm" fo:padding-top="0.141cm" fo:padding-bottom="0.141cm" fo:border="0.1pt solid #dbeafe">
        <style:background-image/>
      </style:table-cell-properties>
    </style:style>
    <style:style style:name="表格4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4.D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4.A3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4.C3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4.A4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4" style:family="table">
      <style:table-properties style:width="15.886cm" fo:margin-left="0.002cm" fo:margin-top="0cm" fo:margin-bottom="0cm" table:align="left" style:writing-mode="page"/>
    </style:style>
    <style:style style:name="表格14.A" style:family="table-column">
      <style:table-column-properties style:column-width="4.41cm"/>
    </style:style>
    <style:style style:name="表格14.B" style:family="table-column">
      <style:table-column-properties style:column-width="3.881cm"/>
    </style:style>
    <style:style style:name="表格14.C" style:family="table-column">
      <style:table-column-properties style:column-width="3.007cm"/>
    </style:style>
    <style:style style:name="表格14.D" style:family="table-column">
      <style:table-column-properties style:column-width="4.588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0d9488" fo:padding-left="0.265cm" fo:padding-right="0.265cm" fo:padding-top="0.176cm" fo:padding-bottom="0.176cm" fo:border="0.1pt solid #0d9488">
        <style:background-image/>
      </style:table-cell-properties>
    </style:style>
    <style:style style:name="表格14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4.B2" style:family="table-cell">
      <style:table-cell-properties fo:background-color="#f0fdf4" fo:padding-left="0.265cm" fo:padding-right="0.265cm" fo:padding-top="0.141cm" fo:padding-bottom="0.141cm" fo:border="0.1pt solid #dbeafe">
        <style:background-image/>
      </style:table-cell-properties>
    </style:style>
    <style:style style:name="表格14.C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4.D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4.D3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4.A4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4.B4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5" style:family="table">
      <style:table-properties style:width="15.886cm" fo:margin-left="0.002cm" fo:margin-top="0cm" fo:margin-bottom="0cm" table:align="left" style:writing-mode="page"/>
    </style:style>
    <style:style style:name="表格15.A" style:family="table-column">
      <style:table-column-properties style:column-width="4.586cm"/>
    </style:style>
    <style:style style:name="表格15.B" style:family="table-column">
      <style:table-column-properties style:column-width="4.057cm"/>
    </style:style>
    <style:style style:name="表格15.C" style:family="table-column">
      <style:table-column-properties style:column-width="3.537cm"/>
    </style:style>
    <style:style style:name="表格15.D" style:family="table-column">
      <style:table-column-properties style:column-width="3.706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7c3aed" fo:padding-left="0.265cm" fo:padding-right="0.265cm" fo:padding-top="0.176cm" fo:padding-bottom="0.176cm" fo:border="0.1pt solid #7c3aed">
        <style:background-image/>
      </style:table-cell-properties>
    </style:style>
    <style:style style:name="表格15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5.B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15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5.D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5.C3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5.D3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5.A4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5.D4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6" style:family="table">
      <style:table-properties style:width="15.886cm" fo:margin-left="0.002cm" fo:margin-top="0cm" fo:margin-bottom="0cm" table:align="left" style:writing-mode="page"/>
    </style:style>
    <style:style style:name="表格16.A" style:family="table-column">
      <style:table-column-properties style:column-width="4.937cm"/>
    </style:style>
    <style:style style:name="表格16.B" style:family="table-column">
      <style:table-column-properties style:column-width="3.53cm"/>
    </style:style>
    <style:style style:name="表格16.C" style:family="table-column">
      <style:table-column-properties style:column-width="7.419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6.A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16.B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6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6.B3" style:family="table-cell">
      <style:table-cell-properties style:vertical-align="middle"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6.C3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6.B4" style:family="table-cell">
      <style:table-cell-properties style:vertical-align="middle"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6.C4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6.B5" style:family="table-cell">
      <style:table-cell-properties style:vertical-align="middle"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6.C5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6.B6" style:family="table-cell">
      <style:table-cell-properties style:vertical-align="middle"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6.C6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5" style:family="table">
      <style:table-properties style:width="15.886cm" fo:margin-left="0.002cm" fo:margin-top="0cm" fo:margin-bottom="0cm" table:align="left" style:writing-mode="page"/>
    </style:style>
    <style:style style:name="表格5.A" style:family="table-column">
      <style:table-column-properties style:column-width="1.409cm"/>
    </style:style>
    <style:style style:name="表格5.B" style:family="table-column">
      <style:table-column-properties style:column-width="2.824cm"/>
    </style:style>
    <style:style style:name="表格5.C" style:family="table-column">
      <style:table-column-properties style:column-width="3.175cm"/>
    </style:style>
    <style:style style:name="表格5.D" style:family="table-column">
      <style:table-column-properties style:column-width="3.526cm"/>
    </style:style>
    <style:style style:name="表格5.E" style:family="table-column">
      <style:table-column-properties style:column-width="4.9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7c3aed" fo:padding-left="0.265cm" fo:padding-right="0.265cm" fo:padding-top="0.176cm" fo:padding-bottom="0.176cm" fo:border="0.1pt solid #7c3aed">
        <style:background-image/>
      </style:table-cell-properties>
    </style:style>
    <style:style style:name="表格5.A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5.B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5.C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5.D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5.E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5.A3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5.E3" style:family="table-cell">
      <style:table-cell-properties style:vertical-align="middle"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5.A4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5.E4" style:family="table-cell">
      <style:table-cell-properties style:vertical-align="middle"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6" style:family="table">
      <style:table-properties style:width="15.886cm" fo:margin-left="0.002cm" fo:margin-top="0cm" fo:margin-bottom="0cm" table:align="left" style:writing-mode="page"/>
    </style:style>
    <style:style style:name="表格6.A" style:family="table-column">
      <style:table-column-properties style:column-width="3.45cm"/>
    </style:style>
    <style:style style:name="表格6.B" style:family="table-column">
      <style:table-column-properties style:column-width="3.106cm"/>
    </style:style>
    <style:style style:name="表格6.E" style:family="table-column">
      <style:table-column-properties style:column-width="3.117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6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6.B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6.C2" style:family="table-cell">
      <style:table-cell-properties style:vertical-align="middle" fo:background-color="#f0fdf4" fo:padding-left="0.265cm" fo:padding-right="0.265cm" fo:padding-top="0.141cm" fo:padding-bottom="0.141cm" fo:border="0.1pt solid #dbeafe">
        <style:background-image/>
      </style:table-cell-properties>
    </style:style>
    <style:style style:name="表格6.D2" style:family="table-cell">
      <style:table-cell-properties style:vertical-align="middle"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6.E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E3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E4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B5" style:family="table-cell">
      <style:table-cell-properties style:vertical-align="middle"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6.E5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E6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7" style:family="table">
      <style:table-properties style:width="15.886cm" fo:margin-left="0.002cm" fo:margin-top="0cm" fo:margin-bottom="0cm" table:align="left" style:writing-mode="page"/>
    </style:style>
    <style:style style:name="表格7.A" style:family="table-column">
      <style:table-column-properties style:column-width="5.643cm"/>
    </style:style>
    <style:style style:name="表格7.B" style:family="table-column">
      <style:table-column-properties style:column-width="10.24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c2626" fo:padding-left="0.265cm" fo:padding-right="0.265cm" fo:padding-top="0.176cm" fo:padding-bottom="0.176cm" fo:border="0.1pt solid #dc2626">
        <style:background-image/>
      </style:table-cell-properties>
    </style:style>
    <style:style style:name="表格7.A2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7.B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7.B3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8" style:family="table">
      <style:table-properties style:width="15.886cm" fo:margin-left="0.002cm" fo:margin-top="0cm" fo:margin-bottom="0cm" table:align="left" style:writing-mode="page"/>
    </style:style>
    <style:style style:name="表格8.A" style:family="table-column">
      <style:table-column-properties style:column-width="2.469cm"/>
    </style:style>
    <style:style style:name="表格8.B" style:family="table-column">
      <style:table-column-properties style:column-width="13.416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f0fdfa" fo:padding-left="0.265cm" fo:padding-right="0.265cm" fo:padding-top="0.212cm" fo:padding-bottom="0.212cm" fo:border="0.1pt solid #dbeafe">
        <style:background-image/>
      </style:table-cell-properties>
    </style:style>
    <style:style style:name="表格8.B1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2" style:family="table-cell">
      <style:table-cell-properties style:vertical-align="middle" fo:background-color="#eff6ff" fo:padding-left="0.265cm" fo:padding-right="0.265cm" fo:padding-top="0.212cm" fo:padding-bottom="0.212cm" fo:border="0.1pt solid #dbeafe">
        <style:background-image/>
      </style:table-cell-properties>
    </style:style>
    <style:style style:name="表格8.B2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3" style:family="table-cell">
      <style:table-cell-properties style:vertical-align="middle" fo:background-color="#f5f3ff" fo:padding-left="0.265cm" fo:padding-right="0.265cm" fo:padding-top="0.212cm" fo:padding-bottom="0.212cm" fo:border="0.1pt solid #dbeafe">
        <style:background-image/>
      </style:table-cell-properties>
    </style:style>
    <style:style style:name="表格8.B3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4" style:family="table-cell">
      <style:table-cell-properties style:vertical-align="middle" fo:background-color="#fff7ed" fo:padding-left="0.265cm" fo:padding-right="0.265cm" fo:padding-top="0.212cm" fo:padding-bottom="0.212cm" fo:border="0.1pt solid #dbeafe">
        <style:background-image/>
      </style:table-cell-properties>
    </style:style>
    <style:style style:name="表格8.B4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B5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6" style:family="table-cell">
      <style:table-cell-properties style:vertical-align="middle" fo:background-color="#fef2f2" fo:padding-left="0.265cm" fo:padding-right="0.265cm" fo:padding-top="0.212cm" fo:padding-bottom="0.212cm" fo:border="0.1pt solid #dbeafe">
        <style:background-image/>
      </style:table-cell-properties>
    </style:style>
    <style:style style:name="表格8.B6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9" style:family="table">
      <style:table-properties style:width="15.886cm" fo:margin-left="0.002cm" fo:margin-top="0cm" fo:margin-bottom="0cm" table:align="left" style:writing-mode="page"/>
    </style:style>
    <style:style style:name="表格9.A" style:family="table-column">
      <style:table-column-properties style:column-width="3.881cm"/>
    </style:style>
    <style:style style:name="表格9.B" style:family="table-column">
      <style:table-column-properties style:column-width="6.001cm"/>
    </style:style>
    <style:style style:name="表格9.C" style:family="table-column">
      <style:table-column-properties style:column-width="6.00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b3a6b" fo:padding-left="0.353cm" fo:padding-right="0.353cm" fo:padding-top="0.176cm" fo:padding-bottom="0.176cm" fo:border="0.1pt solid #1b3a6b">
        <style:background-image/>
      </style:table-cell-properties>
    </style:style>
    <style:style style:name="表格9.A2" style:family="table-cell">
      <style:table-cell-properties fo:background-color="#0d9488" fo:padding-left="0.265cm" fo:padding-right="0.265cm" fo:padding-top="0.176cm" fo:padding-bottom="0.176cm" fo:border="0.1pt solid #0d9488">
        <style:background-image/>
      </style:table-cell-properties>
    </style:style>
    <style:style style:name="表格9.B2" style:family="table-cell">
      <style:table-cell-properties fo:background-color="#7c3aed" fo:padding-left="0.265cm" fo:padding-right="0.265cm" fo:padding-top="0.176cm" fo:padding-bottom="0.176cm" fo:border="0.1pt solid #7c3aed">
        <style:background-image/>
      </style:table-cell-properties>
    </style:style>
    <style:style style:name="表格9.C2" style:family="table-cell">
      <style:table-cell-properties fo:background-color="#ea580c" fo:padding-left="0.265cm" fo:padding-right="0.265cm" fo:padding-top="0.176cm" fo:padding-bottom="0.176cm" fo:border="0.1pt solid #ea580c">
        <style:background-image/>
      </style:table-cell-properties>
    </style:style>
    <style:style style:name="表格9.A3" style:family="table-cell">
      <style:table-cell-properties fo:background-color="#f0fdfa" fo:padding-left="0.265cm" fo:padding-right="0.265cm" fo:padding-top="0.176cm" fo:padding-bottom="0.176cm" fo:border="0.1pt solid #dbeafe">
        <style:background-image/>
      </style:table-cell-properties>
    </style:style>
    <style:style style:name="表格9.B3" style:family="table-cell">
      <style:table-cell-properties fo:background-color="#f5f3ff" fo:padding-left="0.265cm" fo:padding-right="0.265cm" fo:padding-top="0.176cm" fo:padding-bottom="0.176cm" fo:border="0.1pt solid #dbeafe">
        <style:background-image/>
      </style:table-cell-properties>
    </style:style>
    <style:style style:name="表格9.C3" style:family="table-cell">
      <style:table-cell-properties fo:background-color="#fff7ed" fo:padding-left="0.265cm" fo:padding-right="0.265cm" fo:padding-top="0.176cm" fo:padding-bottom="0.176cm" fo:border="0.1pt solid #dbeafe">
        <style:background-image/>
      </style:table-cell-properties>
    </style:style>
    <style:style style:name="P1" style:family="paragraph" style:parent-style-name="Standard">
      <loext:graphic-properties draw:fill="solid" draw:fill-color="#1b3a6b"/>
      <style:paragraph-properties fo:margin-top="1.058cm" fo:margin-bottom="0cm" style:contextual-spacing="false" fo:text-align="center" style:justify-single-word="false" fo:background-color="#1b3a6b"/>
      <style:text-properties style:font-name="Arial" fo:font-size="2pt" style:font-name-asian="Arial1" style:font-size-asian="2pt" style:font-name-complex="Arial1" style:font-size-complex="2pt"/>
    </style:style>
    <style:style style:name="P2" style:family="paragraph" style:parent-style-name="Standard">
      <loext:graphic-properties draw:fill="solid" draw:fill-color="#1b3a6b"/>
      <style:paragraph-properties fo:margin-top="0cm" fo:margin-bottom="0cm" style:contextual-spacing="false" fo:text-align="center" style:justify-single-word="false" fo:background-color="#1b3a6b"/>
      <style:text-properties fo:color="#ffffff" loext:opacity="100%" style:font-name="Arial" fo:font-size="28pt" fo:font-weight="bold" style:font-name-asian="Arial1" style:font-size-asian="28pt" style:font-weight-asian="bold" style:font-name-complex="Arial1" style:font-size-complex="28pt" style:font-weight-complex="bold"/>
    </style:style>
    <style:style style:name="P3" style:family="paragraph" style:parent-style-name="Standard">
      <loext:graphic-properties draw:fill="solid" draw:fill-color="#1b3a6b"/>
      <style:paragraph-properties fo:margin-top="0.071cm" fo:margin-bottom="0cm" style:contextual-spacing="false" fo:text-align="center" style:justify-single-word="false" fo:background-color="#1b3a6b"/>
      <style:text-properties fo:color="#93c5fd" loext:opacity="100%" style:font-name="Arial" fo:font-size="14pt" style:font-name-asian="Arial1" style:font-size-asian="14pt" style:font-name-complex="Arial1" style:font-size-complex="14pt"/>
    </style:style>
    <style:style style:name="P4" style:family="paragraph" style:parent-style-name="Standard">
      <loext:graphic-properties draw:fill="solid" draw:fill-color="#1b3a6b"/>
      <style:paragraph-properties fo:margin-top="0.106cm" fo:margin-bottom="0cm" style:contextual-spacing="false" fo:text-align="center" style:justify-single-word="false" fo:background-color="#1b3a6b"/>
      <style:text-properties fo:color="#bfdbfe" loext:opacity="100%" style:font-name="Arial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P5" style:family="paragraph" style:parent-style-name="Standard">
      <loext:graphic-properties draw:fill="solid" draw:fill-color="#1b3a6b"/>
      <style:paragraph-properties fo:margin-top="0cm" fo:margin-bottom="0.882cm" style:contextual-spacing="false" fo:text-align="center" style:justify-single-word="false" fo:background-color="#1b3a6b"/>
      <style:text-properties style:font-name="Arial" fo:font-size="2pt" style:font-name-asian="Arial1" style:font-size-asian="2pt" style:font-name-complex="Arial1" style:font-size-complex="2pt"/>
    </style:style>
    <style:style style:name="P6" style:family="paragraph" style:parent-style-name="Standard">
      <style:paragraph-properties fo:margin-top="0.529cm" fo:margin-bottom="0.529cm" style:contextual-spacing="false"/>
    </style:style>
    <style:style style:name="P7" style:family="paragraph" style:parent-style-name="Standard">
      <style:paragraph-properties fo:margin-top="0.741cm" fo:margin-bottom="0.212cm" style:contextual-spacing="false" fo:padding-left="0cm" fo:padding-right="0cm" fo:padding-top="0cm" fo:padding-bottom="0.141cm" fo:border-left="none" fo:border-right="none" fo:border-top="none" fo:border-bottom="1.25pt solid #1b3a6b"/>
    </style:style>
    <style:style style:name="P8" style:family="paragraph" style:parent-style-name="Standard">
      <style:paragraph-properties fo:margin-top="0.106cm" fo:margin-bottom="0.106cm" style:contextual-spacing="false"/>
    </style:style>
    <style:style style:name="P9" style:family="paragraph" style:parent-style-name="Standard">
      <loext:graphic-properties draw:fill="solid" draw:fill-color="#eff6ff"/>
      <style:paragraph-properties fo:margin-left="0.635cm" fo:margin-right="0.635cm" fo:margin-top="0.141cm" fo:margin-bottom="0.212cm" style:contextual-spacing="false" fo:text-indent="0cm" style:auto-text-indent="false" fo:background-color="#eff6ff"/>
      <style:text-properties officeooo:paragraph-rsid="0141802d"/>
    </style:style>
    <style:style style:name="P10" style:family="paragraph" style:parent-style-name="Standard">
      <style:paragraph-properties fo:margin-top="0.141cm" fo:margin-bottom="0.141cm" style:contextual-spacing="false"/>
    </style:style>
    <style:style style:name="P11" style:family="paragraph" style:parent-style-name="Standard">
      <style:paragraph-properties fo:margin-top="0.388cm" fo:margin-bottom="0.141cm" style:contextual-spacing="false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4" style:family="paragraph" style:parent-style-name="Standard">
      <style:paragraph-properties fo:text-align="left" style:justify-single-word="false"/>
      <style:text-properties fo:color="#1f2937" loext:opacity="100%" style:font-name="Arial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P15" style:family="paragraph" style:parent-style-name="Standard">
      <style:paragraph-properties fo:text-align="left" style:justify-single-word="false"/>
      <style:text-properties fo:color="#6b7280" loext:opacity="100%" style:font-name="Arial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2563eb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3b82f6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7c3aed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ea580c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dc2626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21" style:family="paragraph" style:parent-style-name="Standard">
      <loext:graphic-properties draw:fill="solid" draw:fill-color="#eff6ff"/>
      <style:paragraph-properties fo:margin-left="0.635cm" fo:margin-right="0.635cm" fo:margin-top="0.176cm" fo:margin-bottom="0.176cm" style:contextual-spacing="false" fo:text-indent="0cm" style:auto-text-indent="false" fo:background-color="#eff6ff" fo:padding-left="0.282cm" fo:padding-right="0cm" fo:padding-top="0cm" fo:padding-bottom="0cm" fo:border-left="2.49pt solid #1b3a6b" fo:border-right="none" fo:border-top="none" fo:border-bottom="none"/>
      <style:text-properties fo:color="#1b3a6b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22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style:font-name-asian="Arial1" style:font-size-asian="11pt" style:font-name-complex="Arial1" style:font-size-complex="11pt"/>
    </style:style>
    <style:style style:name="P23" style:family="paragraph" style:parent-style-name="Standard">
      <loext:graphic-properties draw:fill="solid" draw:fill-color="#f5f3ff"/>
      <style:paragraph-properties fo:margin-left="0.635cm" fo:margin-right="0.635cm" fo:margin-top="0.141cm" fo:margin-bottom="0.141cm" style:contextual-spacing="false" fo:text-indent="0cm" style:auto-text-indent="false" fo:background-color="#f5f3ff"/>
      <style:text-properties fo:color="#1f2937" loext:opacity="100%" style:font-name="Arial" fo:font-size="11pt" style:font-name-asian="Arial1" style:font-size-asian="11pt" style:font-name-complex="Arial1" style:font-size-complex="11pt"/>
    </style:style>
    <style:style style:name="P24" style:family="paragraph" style:parent-style-name="Standard">
      <style:paragraph-properties fo:margin-top="0.353cm" fo:margin-bottom="0.353cm" style:contextual-spacing="false"/>
    </style:style>
    <style:style style:name="P25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style:font-name-asian="Arial1" style:font-size-asian="11pt" style:font-name-complex="Arial1" style:font-size-complex="11pt"/>
    </style:style>
    <style:style style:name="P26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28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29" style:family="paragraph" style:parent-style-name="Standard">
      <loext:graphic-properties draw:fill="solid" draw:fill-color="#1e293b"/>
      <style:paragraph-properties fo:margin-left="0.635cm" fo:margin-right="0cm" fo:margin-top="0.071cm" fo:margin-bottom="0.071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30" style:family="paragraph" style:parent-style-name="Standard">
      <loext:graphic-properties draw:fill="solid" draw:fill-color="#fef2f2"/>
      <style:paragraph-properties fo:margin-left="0.635cm" fo:margin-right="0.635cm" fo:margin-top="0.176cm" fo:margin-bottom="0.176cm" style:contextual-spacing="false" fo:text-indent="0cm" style:auto-text-indent="false" fo:background-color="#fef2f2" fo:padding-left="0.282cm" fo:padding-right="0cm" fo:padding-top="0cm" fo:padding-bottom="0cm" fo:border-left="2.49pt solid #dc2626" fo:border-right="none" fo:border-top="none" fo:border-bottom="none"/>
      <style:text-properties fo:color="#dc2626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31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32" style:family="paragraph" style:parent-style-name="Standard">
      <loext:graphic-properties draw:fill="solid" draw:fill-color="#fff7ed"/>
      <style:paragraph-properties fo:margin-left="0.635cm" fo:margin-right="0.635cm" fo:margin-top="0.176cm" fo:margin-bottom="0.176cm" style:contextual-spacing="false" fo:text-indent="0cm" style:auto-text-indent="false" fo:background-color="#fff7ed" fo:padding-left="0.282cm" fo:padding-right="0cm" fo:padding-top="0cm" fo:padding-bottom="0cm" fo:border-left="2.49pt solid #ea580c" fo:border-right="none" fo:border-top="none" fo:border-bottom="none"/>
      <style:text-properties fo:color="#ea580c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33" style:family="paragraph" style:parent-style-name="Standard">
      <loext:graphic-properties draw:fill="solid" draw:fill-color="#f0fdfa"/>
      <style:paragraph-properties fo:margin-left="0.635cm" fo:margin-right="0.635cm" fo:margin-top="0.176cm" fo:margin-bottom="0.176cm" style:contextual-spacing="false" fo:text-indent="0cm" style:auto-text-indent="false" fo:background-color="#f0fdfa" fo:padding-left="0.282cm" fo:padding-right="0cm" fo:padding-top="0cm" fo:padding-bottom="0cm" fo:border-left="2.49pt solid #0d9488" fo:border-right="none" fo:border-top="none" fo:border-bottom="none"/>
      <style:text-properties fo:color="#0d9488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34" style:family="paragraph" style:parent-style-name="Standard">
      <style:paragraph-properties fo:margin-top="0.176cm" fo:margin-bottom="0.176cm" style:contextual-spacing="false"/>
    </style:style>
    <style:style style:name="P35" style:family="paragraph" style:parent-style-name="Standard">
      <style:text-properties fo:color="#7dd3fc" loext:opacity="100%" style:font-name="Courier New" fo:font-size="9.5pt" style:font-name-asian="Courier New1" style:font-size-asian="9.5pt" style:font-name-complex="Courier New1" style:font-size-complex="9.5pt"/>
    </style:style>
    <style:style style:name="P36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</style:style>
    <style:style style:name="P37" style:family="paragraph" style:parent-style-name="Standard">
      <style:paragraph-properties fo:margin-top="0.353cm" fo:margin-bottom="0.353cm" style:contextual-spacing="false"/>
      <style:text-properties officeooo:paragraph-rsid="0048c223"/>
    </style:style>
    <style:style style:name="P38" style:family="paragraph" style:parent-style-name="Standard">
      <style:paragraph-properties fo:margin-top="0.388cm" fo:margin-bottom="0.141cm" style:contextual-spacing="false"/>
      <style:text-properties style:font-name="Arial" fo:font-size="12pt" officeooo:paragraph-rsid="00652328" style:font-name-asian="Arial1" style:font-size-asian="12pt" style:font-name-complex="Arial1" style:font-size-complex="12pt"/>
    </style:style>
    <style:style style:name="P39" style:family="paragraph" style:parent-style-name="Standard">
      <style:paragraph-properties fo:margin-top="0.388cm" fo:margin-bottom="0.141cm" style:contextual-spacing="false"/>
      <style:text-properties officeooo:paragraph-rsid="00652328"/>
    </style:style>
    <style:style style:name="P40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0652328" style:font-name-asian="Arial1" style:font-size-asian="11pt" style:font-name-complex="Arial1" style:font-size-complex="11pt"/>
    </style:style>
    <style:style style:name="P41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52328" style:font-name-asian="Courier New1" style:font-size-asian="10pt" style:font-name-complex="Courier New1" style:font-size-complex="10pt"/>
    </style:style>
    <style:style style:name="P42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0652328"/>
    </style:style>
    <style:style style:name="P43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52328" style:font-name-asian="Courier New1" style:font-size-asian="10pt" style:font-name-complex="Courier New1" style:font-size-complex="10pt"/>
    </style:style>
    <style:style style:name="P44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0652328" style:font-name-asian="Courier New1" style:font-size-asian="10pt" style:font-name-complex="Courier New1" style:font-size-complex="10pt"/>
    </style:style>
    <style:style style:name="P45" style:family="paragraph" style:parent-style-name="Standard">
      <style:paragraph-properties fo:margin-top="0.106cm" fo:margin-bottom="0.106cm" style:contextual-spacing="false"/>
      <style:text-properties officeooo:paragraph-rsid="00652328"/>
    </style:style>
    <style:style style:name="P46" style:family="paragraph" style:parent-style-name="Standard">
      <loext:graphic-properties draw:fill="solid" draw:fill-color="#f0fdfa"/>
      <style:paragraph-properties fo:margin-left="0.635cm" fo:margin-right="0.635cm" fo:margin-top="0.176cm" fo:margin-bottom="0.176cm" style:contextual-spacing="false" fo:text-indent="0cm" style:auto-text-indent="false" fo:background-color="#f0fdfa" fo:padding-left="0.282cm" fo:padding-right="0cm" fo:padding-top="0cm" fo:padding-bottom="0cm" fo:border-left="2.49pt solid #0d9488" fo:border-right="none" fo:border-top="none" fo:border-bottom="none"/>
      <style:text-properties fo:color="#0d9488" loext:opacity="100%" style:font-name="Arial" fo:font-size="11pt" fo:font-weight="bold" officeooo:paragraph-rsid="00652328" style:font-name-asian="Arial1" style:font-size-asian="11pt" style:font-weight-asian="bold" style:font-name-complex="Arial1" style:font-size-complex="11pt" style:font-weight-complex="bold"/>
    </style:style>
    <style:style style:name="P47" style:family="paragraph" style:parent-style-name="Standard">
      <style:paragraph-properties fo:margin-top="0.176cm" fo:margin-bottom="0.176cm" style:contextual-spacing="false"/>
      <style:text-properties officeooo:paragraph-rsid="00652328"/>
    </style:style>
    <style:style style:name="P48" style:family="paragraph" style:parent-style-name="Standard">
      <style:paragraph-properties fo:margin-top="0.388cm" fo:margin-bottom="0.141cm" style:contextual-spacing="false"/>
      <style:text-properties officeooo:paragraph-rsid="006bb197"/>
    </style:style>
    <style:style style:name="P49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06bb197" style:font-name-asian="Arial1" style:font-size-asian="11pt" style:font-name-complex="Arial1" style:font-size-complex="11pt"/>
    </style:style>
    <style:style style:name="P50" style:family="paragraph" style:parent-style-name="Standard">
      <style:paragraph-properties fo:margin-top="0.106cm" fo:margin-bottom="0.106cm" style:contextual-spacing="false"/>
      <style:text-properties officeooo:paragraph-rsid="006bb197"/>
    </style:style>
    <style:style style:name="P51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bb197" style:font-name-asian="Courier New1" style:font-size-asian="10pt" style:font-name-complex="Courier New1" style:font-size-complex="10pt"/>
    </style:style>
    <style:style style:name="P52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06bb197"/>
    </style:style>
    <style:style style:name="P53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bb197" style:font-name-asian="Courier New1" style:font-size-asian="10pt" style:font-name-complex="Courier New1" style:font-size-complex="10pt"/>
    </style:style>
    <style:style style:name="P54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06bb197" style:font-name-asian="Courier New1" style:font-size-asian="10pt" style:font-name-complex="Courier New1" style:font-size-complex="10pt"/>
    </style:style>
    <style:style style:name="P55" style:family="paragraph" style:parent-style-name="Standard">
      <style:paragraph-properties fo:margin-top="0.141cm" fo:margin-bottom="0.141cm" style:contextual-spacing="false"/>
      <style:text-properties officeooo:paragraph-rsid="006bb197"/>
    </style:style>
    <style:style style:name="P56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06bb197" style:font-name-asian="Arial1" style:font-size-asian="11pt" style:font-weight-asian="bold" style:font-name-complex="Arial1" style:font-size-complex="11pt" style:font-weight-complex="bold"/>
    </style:style>
    <style:style style:name="P57" style:family="paragraph" style:parent-style-name="Standard">
      <style:paragraph-properties fo:margin-top="0.071cm" fo:margin-bottom="0.071cm" style:contextual-spacing="false"/>
      <style:text-properties officeooo:paragraph-rsid="006bb197"/>
    </style:style>
    <style:style style:name="P58" style:family="paragraph" style:parent-style-name="Standard">
      <loext:graphic-properties draw:fill="solid" draw:fill-color="#fffbeb"/>
      <style:paragraph-properties fo:margin-left="0.635cm" fo:margin-right="0.635cm" fo:margin-top="0.141cm" fo:margin-bottom="0.141cm" style:contextual-spacing="false" fo:text-indent="0cm" style:auto-text-indent="false" fo:background-color="#fffbeb" fo:padding-left="0.282cm" fo:padding-right="0cm" fo:padding-top="0cm" fo:padding-bottom="0cm" fo:border-left="2.49pt solid #d97706" fo:border-right="none" fo:border-top="none" fo:border-bottom="none"/>
      <style:text-properties officeooo:paragraph-rsid="006bb197"/>
    </style:style>
    <style:style style:name="P59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06bb197" style:font-name-asian="Arial1" style:font-size-asian="10.5pt" style:font-weight-asian="bold" style:font-name-complex="Arial1" style:font-size-complex="10.5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ea580c" loext:opacity="100%" style:font-name="Arial" fo:font-size="10.5pt" fo:font-weight="bold" officeooo:paragraph-rsid="006bb197" style:font-name-asian="Arial1" style:font-size-asian="10.5pt" style:font-weight-asian="bold" style:font-name-complex="Arial1" style:font-size-complex="10.5pt" style:font-weight-complex="bold"/>
    </style:style>
    <style:style style:name="P61" style:family="paragraph" style:parent-style-name="Standard">
      <style:text-properties fo:color="#7dd3fc" loext:opacity="100%" style:font-name="Courier New" fo:font-size="9.5pt" officeooo:paragraph-rsid="006bb197" style:font-name-asian="Courier New1" style:font-size-asian="9.5pt" style:font-name-complex="Courier New1" style:font-size-complex="9.5pt"/>
    </style:style>
    <style:style style:name="P62" style:family="paragraph" style:parent-style-name="Standard">
      <style:paragraph-properties fo:text-align="center" style:justify-single-word="false"/>
      <style:text-properties fo:color="#6b7280" loext:opacity="100%" style:font-name="Arial" fo:font-size="10.5pt" fo:font-weight="normal" officeooo:paragraph-rsid="006bb197" style:font-name-asian="Arial1" style:font-size-asian="10.5pt" style:font-weight-asian="normal" style:font-name-complex="Arial1" style:font-size-complex="10.5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ea580c" loext:opacity="100%" style:font-name="Courier New" fo:font-size="11pt" fo:font-weight="bold" officeooo:paragraph-rsid="006bb197" style:font-name-asian="Courier New1" style:font-size-asian="11pt" style:font-weight-asian="bold" style:font-name-complex="Courier New1" style:font-size-complex="11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bb197" style:font-name-asian="Arial1" style:font-size-asian="11pt" style:font-weight-asian="bold" style:font-name-complex="Arial1" style:font-size-complex="11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18ffff" loext:opacity="100%" style:font-name="Courier New" fo:font-size="13pt" fo:font-weight="bold" officeooo:paragraph-rsid="006bb197" fo:background-color="#d500f9" style:font-name-asian="Courier New1" style:font-size-asian="13pt" style:font-weight-asian="bold" style:font-name-complex="Courier New1" style:font-size-complex="13pt" style:font-weight-complex="bold"/>
    </style:style>
    <style:style style:name="P66" style:family="paragraph" style:parent-style-name="Standard">
      <loext:graphic-properties draw:fill="solid" draw:fill-color="#fff7ed"/>
      <style:paragraph-properties fo:margin-left="0.635cm" fo:margin-right="0.635cm" fo:margin-top="0.176cm" fo:margin-bottom="0.176cm" style:contextual-spacing="false" fo:text-indent="0cm" style:auto-text-indent="false" fo:background-color="#fff7ed" fo:padding-left="0.282cm" fo:padding-right="0cm" fo:padding-top="0cm" fo:padding-bottom="0cm" fo:border-left="2.49pt solid #ea580c" fo:border-right="none" fo:border-top="none" fo:border-bottom="none"/>
      <style:text-properties officeooo:paragraph-rsid="006bb197"/>
    </style:style>
    <style:style style:name="P67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0652328" style:font-name-asian="Arial1" style:font-size-asian="11pt" style:font-weight-asian="bold" style:font-name-complex="Arial1" style:font-size-complex="11pt" style:font-weight-complex="bold"/>
    </style:style>
    <style:style style:name="P68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officeooo:paragraph-rsid="00652328" style:font-name-asian="Arial1" style:font-size-asian="11pt" style:font-name-complex="Arial1" style:font-size-complex="11pt"/>
    </style:style>
    <style:style style:name="P69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fo:font-weight="bold" officeooo:paragraph-rsid="00652328" fo:background-color="#1de9b6" style:font-name-asian="Arial1" style:font-size-asian="11pt" style:font-weight-asian="bold" style:font-name-complex="Arial1" style:font-size-complex="11pt" style:font-weight-complex="bold"/>
    </style:style>
    <style:style style:name="P70" style:family="paragraph" style:parent-style-name="Standard">
      <loext:graphic-properties draw:fill="solid" draw:fill-color="#f5f3ff"/>
      <style:paragraph-properties fo:margin-left="0.635cm" fo:margin-right="0.635cm" fo:margin-top="0.176cm" fo:margin-bottom="0.176cm" style:contextual-spacing="false" fo:text-indent="0cm" style:auto-text-indent="false" fo:background-color="#f5f3ff" fo:padding-left="0.282cm" fo:padding-right="0cm" fo:padding-top="0cm" fo:padding-bottom="0cm" fo:border-left="2.49pt solid #7c3aed" fo:border-right="none" fo:border-top="none" fo:border-bottom="none"/>
      <style:text-properties fo:color="#7c3aed" loext:opacity="100%" style:font-name="Arial" fo:font-size="11pt" fo:font-weight="bold" officeooo:paragraph-rsid="00652328" style:font-name-asian="Arial1" style:font-size-asian="11pt" style:font-weight-asian="bold" style:font-name-complex="Arial1" style:font-size-complex="11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0652328" style:font-name-asian="Arial1" style:font-size-asian="10.5pt" style:font-weight-asian="bold" style:font-name-complex="Arial1" style:font-size-complex="10.5pt" style:font-weight-complex="bold"/>
    </style:style>
    <style:style style:name="P72" style:family="paragraph" style:parent-style-name="Standard">
      <style:paragraph-properties fo:text-align="left" style:justify-single-word="false"/>
      <style:text-properties fo:color="#1b3a6b" loext:opacity="100%" style:font-name="Arial" fo:font-size="10.5pt" fo:font-weight="bold" officeooo:paragraph-rsid="00652328" style:font-name-asian="Arial1" style:font-size-asian="10.5pt" style:font-weight-asian="bold" style:font-name-complex="Arial1" style:font-size-complex="10.5pt" style:font-weight-complex="bold"/>
    </style:style>
    <style:style style:name="P73" style:family="paragraph" style:parent-style-name="Standard">
      <style:paragraph-properties fo:text-align="left" style:justify-single-word="false"/>
      <style:text-properties fo:color="#6b7280" loext:opacity="100%" style:font-name="Arial" fo:font-size="10.5pt" fo:font-weight="normal" officeooo:paragraph-rsid="00652328" style:font-name-asian="Arial1" style:font-size-asian="10.5pt" style:font-weight-asian="normal" style:font-name-complex="Arial1" style:font-size-complex="10.5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2563eb" loext:opacity="100%" style:font-name="Courier New" fo:font-size="11pt" fo:font-weight="bold" officeooo:paragraph-rsid="00652328" style:font-name-asian="Courier New1" style:font-size-asian="11pt" style:font-weight-asian="bold" style:font-name-complex="Courier New1" style:font-size-complex="11pt" style:font-weight-complex="bold"/>
    </style:style>
    <style:style style:name="P75" style:family="paragraph" style:parent-style-name="Standard">
      <style:paragraph-properties fo:text-align="left" style:justify-single-word="false"/>
      <style:text-properties fo:color="#0d9488" loext:opacity="100%" style:font-name="Arial" fo:font-size="10.5pt" fo:font-weight="bold" officeooo:paragraph-rsid="00652328" style:font-name-asian="Arial1" style:font-size-asian="10.5pt" style:font-weight-asian="bold" style:font-name-complex="Arial1" style:font-size-complex="10.5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officeooo:paragraph-rsid="00652328" style:font-name-asian="Courier New1" style:font-size-asian="11pt" style:font-weight-asian="bold" style:font-name-complex="Courier New1" style:font-size-complex="11pt" style:font-weight-complex="bold"/>
    </style:style>
    <style:style style:name="P77" style:family="paragraph" style:parent-style-name="Standard">
      <style:paragraph-properties fo:text-align="left" style:justify-single-word="false"/>
      <style:text-properties fo:color="#7c3aed" loext:opacity="100%" style:font-name="Arial" fo:font-size="10.5pt" fo:font-weight="bold" officeooo:paragraph-rsid="00652328" style:font-name-asian="Arial1" style:font-size-asian="10.5pt" style:font-weight-asian="bold" style:font-name-complex="Arial1" style:font-size-complex="10.5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7c3aed" loext:opacity="100%" style:font-name="Courier New" fo:font-size="11pt" fo:font-weight="bold" officeooo:paragraph-rsid="00652328" style:font-name-asian="Courier New1" style:font-size-asian="11pt" style:font-weight-asian="bold" style:font-name-complex="Courier New1" style:font-size-complex="11pt" style:font-weight-complex="bold"/>
    </style:style>
    <style:style style:name="P79" style:family="paragraph" style:parent-style-name="Standard">
      <style:paragraph-properties fo:margin-top="0.353cm" fo:margin-bottom="0.353cm" style:contextual-spacing="false"/>
      <style:text-properties officeooo:paragraph-rsid="00652328"/>
    </style:style>
    <style:style style:name="P80" style:family="paragraph" style:parent-style-name="Standard">
      <style:paragraph-properties fo:text-align="center" style:justify-single-word="false"/>
      <style:text-properties fo:color="#0d9488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1" style:family="paragraph" style:parent-style-name="Standard">
      <style:paragraph-properties fo:margin-top="0.071cm" fo:margin-bottom="0.071cm" style:contextual-spacing="false"/>
    </style:style>
    <style:style style:name="P82" style:family="paragraph" style:parent-style-name="Standard">
      <style:paragraph-properties fo:margin-top="0.071cm" fo:margin-bottom="0.071cm" style:contextual-spacing="false"/>
      <style:text-properties fo:color="#1f2937" loext:opacity="100%" style:font-name="Arial" fo:font-size="10.5pt" fo:font-weight="bold" fo:background-color="#ffff00" style:font-name-asian="Arial1" style:font-size-asian="10.5pt" style:font-weight-asian="bold" style:font-name-complex="Arial1" style:font-size-complex="10.5pt" style:font-weight-complex="bold"/>
    </style:style>
    <style:style style:name="P83" style:family="paragraph" style:parent-style-name="Standard">
      <style:paragraph-properties fo:margin-top="0.071cm" fo:margin-bottom="0.071cm" style:contextual-spacing="false"/>
      <style:text-properties fo:color="#1f2937" loext:opacity="100%" style:font-name="Arial" fo:font-size="10.5pt" style:font-name-asian="Arial1" style:font-size-asian="10.5pt" style:font-name-complex="Arial1" style:font-size-complex="10.5pt"/>
    </style:style>
    <style:style style:name="P84" style:family="paragraph" style:parent-style-name="Standard">
      <style:paragraph-properties fo:text-align="center" style:justify-single-word="false"/>
      <style:text-properties fo:color="#0d9488" loext:opacity="100%" style:font-name="Courier New" fo:font-size="14pt" fo:font-weight="bold" style:font-name-asian="Courier New1" style:font-size-asian="14pt" style:font-weight-asian="bold" style:font-name-complex="Courier New1" style:font-size-complex="14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dc2626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dc2626" loext:opacity="100%" style:font-name="Courier New" fo:font-size="14pt" fo:font-weight="bold" style:font-name-asian="Courier New1" style:font-size-asian="14pt" style:font-weight-asian="bold" style:font-name-complex="Courier New1" style:font-size-complex="14pt" style:font-weight-complex="bold"/>
    </style:style>
    <style:style style:name="P87" style:family="paragraph" style:parent-style-name="Standard">
      <loext:graphic-properties draw:fill="solid" draw:fill-color="#fef2f2"/>
      <style:paragraph-properties fo:margin-left="0.635cm" fo:margin-right="0.635cm" fo:margin-top="0.176cm" fo:margin-bottom="0.176cm" style:contextual-spacing="false" fo:text-indent="0cm" style:auto-text-indent="false" fo:background-color="#fef2f2" fo:padding-left="0.282cm" fo:padding-right="0cm" fo:padding-top="0cm" fo:padding-bottom="0cm" fo:border-left="2.49pt solid #dc2626" fo:border-right="none" fo:border-top="none" fo:border-bottom="none"/>
      <style:text-properties fo:color="#dc2626" loext:opacity="100%" style:font-name="Arial" fo:font-size="11pt" fo:font-weight="bold" officeooo:paragraph-rsid="00e68d8c" style:font-name-asian="Arial1" style:font-size-asian="11pt" style:font-weight-asian="bold" style:font-name-complex="Arial1" style:font-size-complex="11pt" style:font-weight-complex="bold"/>
    </style:style>
    <style:style style:name="P88" style:family="paragraph" style:parent-style-name="Standard">
      <style:paragraph-properties fo:margin-top="0.388cm" fo:margin-bottom="0.141cm" style:contextual-spacing="false"/>
      <style:text-properties style:font-name="Arial" fo:font-size="12pt" officeooo:paragraph-rsid="00e68d8c" style:font-name-asian="Arial1" style:font-size-asian="12pt" style:font-name-complex="Arial1" style:font-size-complex="12pt"/>
    </style:style>
    <style:style style:name="P89" style:family="paragraph" style:parent-style-name="Standard">
      <style:paragraph-properties fo:margin-top="0.388cm" fo:margin-bottom="0.141cm" style:contextual-spacing="false"/>
      <style:text-properties officeooo:paragraph-rsid="00e68d8c"/>
    </style:style>
    <style:style style:name="P90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0e68d8c" style:font-name-asian="Arial1" style:font-size-asian="11pt" style:font-name-complex="Arial1" style:font-size-complex="11pt"/>
    </style:style>
    <style:style style:name="P91" style:family="paragraph" style:parent-style-name="Standard">
      <style:paragraph-properties fo:margin-top="0.106cm" fo:margin-bottom="0.106cm" style:contextual-spacing="false"/>
      <style:text-properties officeooo:paragraph-rsid="00e68d8c"/>
    </style:style>
    <style:style style:name="P92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93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94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0e68d8c"/>
    </style:style>
    <style:style style:name="P95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96" style:family="paragraph" style:parent-style-name="Standard">
      <style:paragraph-properties fo:margin-top="0.141cm" fo:margin-bottom="0.141cm" style:contextual-spacing="false"/>
      <style:text-properties officeooo:paragraph-rsid="00e68d8c"/>
    </style:style>
    <style:style style:name="P97" style:family="paragraph" style:parent-style-name="Standard">
      <style:paragraph-properties fo:margin-top="0.071cm" fo:margin-bottom="0.071cm" style:contextual-spacing="false"/>
      <style:text-properties officeooo:paragraph-rsid="00e68d8c"/>
    </style:style>
    <style:style style:name="P98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0e68d8c" style:font-name-asian="Arial1" style:font-size-asian="11pt" style:font-weight-asian="bold" style:font-name-complex="Arial1" style:font-size-complex="11pt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0d9488" loext:opacity="100%" style:font-name="Arial" fo:font-size="12pt" fo:font-weight="bold" officeooo:paragraph-rsid="00e68d8c" style:font-name-asian="Arial1" style:font-size-asian="12pt" style:font-weight-asian="bold" style:font-name-complex="Arial1" style:font-size-complex="12pt" style:font-weight-complex="bold"/>
    </style:style>
    <style:style style:name="P100" style:family="paragraph" style:parent-style-name="Standard">
      <style:paragraph-properties fo:margin-top="0.053cm" fo:margin-bottom="0.053cm" style:contextual-spacing="false"/>
      <style:text-properties fo:color="#0d9488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101" style:family="paragraph" style:parent-style-name="Standard">
      <style:paragraph-properties fo:margin-top="0.053cm" fo:margin-bottom="0.053cm" style:contextual-spacing="false"/>
      <style:text-properties officeooo:paragraph-rsid="00e68d8c"/>
    </style:style>
    <style:style style:name="P102" style:family="paragraph" style:parent-style-name="Standard">
      <style:paragraph-properties fo:text-align="center" style:justify-single-word="false"/>
      <style:text-properties fo:color="#0d9488" loext:opacity="100%" style:font-name="Courier New" fo:font-size="13pt" fo:font-weight="bold" officeooo:paragraph-rsid="00e68d8c" style:font-name-asian="Courier New1" style:font-size-asian="13pt" style:font-weight-asian="bold" style:font-name-complex="Courier New1" style:font-size-complex="13pt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dc2626" loext:opacity="100%" style:font-name="Arial" fo:font-size="12pt" fo:font-weight="bold" officeooo:paragraph-rsid="00e68d8c" style:font-name-asian="Arial1" style:font-size-asian="12pt" style:font-weight-asian="bold" style:font-name-complex="Arial1" style:font-size-complex="12pt" style:font-weight-complex="bold"/>
    </style:style>
    <style:style style:name="P104" style:family="paragraph" style:parent-style-name="Standard">
      <style:paragraph-properties fo:margin-top="0.053cm" fo:margin-bottom="0.053cm" style:contextual-spacing="false"/>
      <style:text-properties fo:color="#dc2626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105" style:family="paragraph" style:parent-style-name="Standard">
      <style:paragraph-properties fo:margin-top="0.053cm" fo:margin-bottom="0.053cm" style:contextual-spacing="false"/>
      <style:text-properties fo:color="#dc2626" loext:opacity="100%" style:font-name="Courier New" fo:font-size="10pt" fo:font-weight="bold" officeooo:paragraph-rsid="00e68d8c" fo:background-color="#ffd740" style:font-name-asian="Courier New1" style:font-size-asian="10pt" style:font-weight-asian="bold" style:font-name-complex="Courier New1" style:font-size-complex="10pt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dc2626" loext:opacity="100%" style:font-name="Courier New" fo:font-size="13pt" fo:font-weight="bold" officeooo:paragraph-rsid="00e68d8c" style:font-name-asian="Courier New1" style:font-size-asian="13pt" style:font-weight-asian="bold" style:font-name-complex="Courier New1" style:font-size-complex="13pt" style:font-weight-complex="bold"/>
    </style:style>
    <style:style style:name="P107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officeooo:paragraph-rsid="00e68d8c" style:font-name-asian="Arial1" style:font-size-asian="11pt" style:font-name-complex="Arial1" style:font-size-complex="11pt"/>
    </style:style>
    <style:style style:name="P108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0e68d8c" style:font-name-asian="Arial1" style:font-size-asian="10.5pt" style:font-weight-asian="bold" style:font-name-complex="Arial1" style:font-size-complex="10.5pt" style:font-weight-complex="bold"/>
    </style:style>
    <style:style style:name="P109" style:family="paragraph" style:parent-style-name="Standard">
      <style:paragraph-properties fo:text-align="left" style:justify-single-word="false"/>
      <style:text-properties fo:color="#0d9488" loext:opacity="100%" style:font-name="Arial" fo:font-size="10.5pt" fo:font-weight="bold" officeooo:paragraph-rsid="00e68d8c" style:font-name-asian="Arial1" style:font-size-asian="10.5pt" style:font-weight-asian="bold" style:font-name-complex="Arial1" style:font-size-complex="10.5pt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officeooo:paragraph-rsid="00e68d8c" style:font-name-asian="Courier New1" style:font-size-asian="11pt" style:font-weight-asian="bold" style:font-name-complex="Courier New1" style:font-size-complex="11pt" style:font-weight-complex="bold"/>
    </style:style>
    <style:style style:name="P111" style:family="paragraph" style:parent-style-name="Standard">
      <style:paragraph-properties fo:text-align="left" style:justify-single-word="false"/>
      <style:text-properties fo:color="#6b7280" loext:opacity="100%" style:font-name="Arial" fo:font-size="10.5pt" fo:font-weight="normal" officeooo:paragraph-rsid="00e68d8c" style:font-name-asian="Arial1" style:font-size-asian="10.5pt" style:font-weight-asian="normal" style:font-name-complex="Arial1" style:font-size-complex="10.5pt" style:font-weight-complex="normal"/>
    </style:style>
    <style:style style:name="P112" style:family="paragraph" style:parent-style-name="Standard">
      <style:paragraph-properties fo:text-align="left" style:justify-single-word="false"/>
      <style:text-properties fo:color="#dc2626" loext:opacity="100%" style:font-name="Arial" fo:font-size="10.5pt" fo:font-weight="bold" officeooo:paragraph-rsid="00e68d8c" fo:background-color="#ffff00" style:font-name-asian="Arial1" style:font-size-asian="10.5pt" style:font-weight-asian="bold" style:font-name-complex="Arial1" style:font-size-complex="10.5pt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dc2626" loext:opacity="100%" style:font-name="Courier New" fo:font-size="11pt" fo:font-weight="bold" officeooo:paragraph-rsid="00e68d8c" style:font-name-asian="Courier New1" style:font-size-asian="11pt" style:font-weight-asian="bold" style:font-name-complex="Courier New1" style:font-size-complex="11pt" style:font-weight-complex="bold"/>
    </style:style>
    <style:style style:name="P114" style:family="paragraph" style:parent-style-name="Standard">
      <style:paragraph-properties fo:margin-top="0.353cm" fo:margin-bottom="0.353cm" style:contextual-spacing="false"/>
      <style:text-properties officeooo:paragraph-rsid="00e68d8c"/>
    </style:style>
    <style:style style:name="P115" style:family="paragraph" style:parent-style-name="Standard">
      <style:paragraph-properties fo:text-align="center" style:justify-single-word="false"/>
      <style:text-properties fo:color="#16a34a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16a34a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6b7280" loext:opacity="100%" style:font-name="Arial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2563eb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ea580c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120" style:family="paragraph" style:parent-style-name="Standard">
      <style:paragraph-properties fo:margin-top="0.388cm" fo:margin-bottom="0.141cm" style:contextual-spacing="false"/>
      <style:text-properties officeooo:paragraph-rsid="01205b64"/>
    </style:style>
    <style:style style:name="P121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1205b64" style:font-name-asian="Arial1" style:font-size-asian="11pt" style:font-name-complex="Arial1" style:font-size-complex="11pt"/>
    </style:style>
    <style:style style:name="P122" style:family="paragraph" style:parent-style-name="Standard">
      <style:paragraph-properties fo:margin-top="0.071cm" fo:margin-bottom="0.071cm" style:contextual-spacing="false"/>
      <style:text-properties officeooo:paragraph-rsid="01205b64"/>
    </style:style>
    <style:style style:name="P123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1205b64" style:font-name-asian="Arial1" style:font-size-asian="11pt" style:font-weight-asian="bold" style:font-name-complex="Arial1" style:font-size-complex="11pt" style:font-weight-complex="bold"/>
    </style:style>
    <style:style style:name="P124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officeooo:paragraph-rsid="01205b64" style:font-name-asian="Arial1" style:font-size-asian="11pt" style:font-name-complex="Arial1" style:font-size-complex="11pt"/>
    </style:style>
    <style:style style:name="P125" style:family="paragraph" style:parent-style-name="Standard">
      <style:paragraph-properties fo:margin-top="0.106cm" fo:margin-bottom="0.106cm" style:contextual-spacing="false"/>
      <style:text-properties officeooo:paragraph-rsid="01205b64"/>
    </style:style>
    <style:style style:name="P126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1205b64" style:font-name-asian="Arial1" style:font-size-asian="10.5pt" style:font-weight-asian="bold" style:font-name-complex="Arial1" style:font-size-complex="10.5pt" style:font-weight-complex="bold"/>
    </style:style>
    <style:style style:name="P127" style:family="paragraph" style:parent-style-name="Standard">
      <style:paragraph-properties fo:text-align="left" style:justify-single-word="false"/>
      <style:text-properties fo:color="#1b3a6b" loext:opacity="100%" style:font-name="Arial" fo:font-size="10.5pt" fo:font-weight="bold" officeooo:paragraph-rsid="01205b64" style:font-name-asian="Arial1" style:font-size-asian="10.5pt" style:font-weight-asian="bold" style:font-name-complex="Arial1" style:font-size-complex="10.5pt" style:font-weight-complex="bold"/>
    </style:style>
    <style:style style:name="P128" style:family="paragraph" style:parent-style-name="Standard">
      <style:paragraph-properties fo:text-align="center" style:justify-single-word="false"/>
      <style:text-properties fo:color="#16a34a" loext:opacity="100%" style:font-name="Arial" fo:font-size="11pt" fo:font-weight="bold" officeooo:paragraph-rsid="01205b64" style:font-name-asian="Arial1" style:font-size-asian="11pt" style:font-weight-asian="bold" style:font-name-complex="Arial1" style:font-size-complex="11pt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130" style:family="paragraph" style:parent-style-name="Standard">
      <style:paragraph-properties fo:text-align="left" style:justify-single-word="false"/>
      <style:text-properties fo:color="#6b7280" loext:opacity="100%" style:font-name="Arial" fo:font-size="10.5pt" fo:font-weight="normal" officeooo:paragraph-rsid="01205b64" style:font-name-asian="Arial1" style:font-size-asian="10.5pt" style:font-weight-asian="normal" style:font-name-complex="Arial1" style:font-size-complex="10.5pt" style:font-weight-complex="normal"/>
    </style:style>
    <style:style style:name="P131" style:family="paragraph" style:parent-style-name="Standard">
      <style:paragraph-properties fo:text-align="left" style:justify-single-word="false"/>
      <style:text-properties fo:color="#ea580c" loext:opacity="100%" style:font-name="Arial" fo:font-size="10.5pt" fo:font-weight="bold" officeooo:paragraph-rsid="01205b64" style:font-name-asian="Arial1" style:font-size-asian="10.5pt" style:font-weight-asian="bold" style:font-name-complex="Arial1" style:font-size-complex="10.5pt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dc2626" loext:opacity="100%" style:font-name="Arial" fo:font-size="11pt" fo:font-weight="bold" officeooo:paragraph-rsid="01205b64" style:font-name-asian="Arial1" style:font-size-asian="11pt" style:font-weight-asian="bold" style:font-name-complex="Arial1" style:font-size-complex="11pt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dc2626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134" style:family="paragraph" style:parent-style-name="Standard">
      <style:paragraph-properties fo:margin-top="0.176cm" fo:margin-bottom="0.176cm" style:contextual-spacing="false"/>
      <style:text-properties officeooo:paragraph-rsid="01205b64"/>
    </style:style>
    <style:style style:name="P135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1205b64" style:font-name-asian="Courier New1" style:font-size-asian="10pt" style:font-name-complex="Courier New1" style:font-size-complex="10pt"/>
    </style:style>
    <style:style style:name="P136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1205b64" style:font-name-asian="Courier New1" style:font-size-asian="10pt" style:font-name-complex="Courier New1" style:font-size-complex="10pt"/>
    </style:style>
    <style:style style:name="P137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1205b64"/>
    </style:style>
    <style:style style:name="P138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1205b64" style:font-name-asian="Courier New1" style:font-size-asian="10pt" style:font-name-complex="Courier New1" style:font-size-complex="10pt"/>
    </style:style>
    <style:style style:name="P139" style:family="paragraph" style:parent-style-name="Standard">
      <style:text-properties fo:color="#7dd3fc" loext:opacity="100%" style:font-name="Courier New" fo:font-size="9.5pt" officeooo:paragraph-rsid="01205b64" style:font-name-asian="Courier New1" style:font-size-asian="9.5pt" style:font-name-complex="Courier New1" style:font-size-complex="9.5pt"/>
    </style:style>
    <style:style style:name="P140" style:family="paragraph" style:parent-style-name="Standard">
      <style:paragraph-properties fo:text-align="left" style:justify-single-word="false"/>
      <style:text-properties fo:color="#6b7280" loext:opacity="100%" style:font-name="Arial" fo:font-size="10.5pt" fo:font-weight="normal" officeooo:paragraph-rsid="01205b64" fo:background-color="#ffd740" style:font-name-asian="Arial1" style:font-size-asian="10.5pt" style:font-weight-asian="normal" style:font-name-complex="Arial1" style:font-size-complex="10.5pt" style:font-weight-complex="normal"/>
    </style:style>
    <style:style style:name="P141" style:family="paragraph" style:parent-style-name="Standard">
      <style:paragraph-properties fo:text-align="center" style:justify-single-word="false"/>
      <style:text-properties fo:color="#7c3aed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142" style:family="paragraph" style:parent-style-name="Standard">
      <style:paragraph-properties fo:margin-top="0.141cm" fo:margin-bottom="0.141cm" style:contextual-spacing="false"/>
      <style:text-properties officeooo:paragraph-rsid="01205b64"/>
    </style:style>
    <style:style style:name="P143" style:family="paragraph" style:parent-style-name="Standard">
      <style:paragraph-properties fo:text-align="left" style:justify-single-word="false"/>
      <style:text-properties fo:color="#1f2937" loext:opacity="100%" style:font-name="Arial" fo:font-size="10.5pt" fo:font-weight="normal" officeooo:paragraph-rsid="01205b64" style:font-name-asian="Arial1" style:font-size-asian="10.5pt" style:font-weight-asian="normal" style:font-name-complex="Arial1" style:font-size-complex="10.5pt" style:font-weight-complex="normal"/>
    </style:style>
    <style:style style:name="P144" style:family="paragraph" style:parent-style-name="Standard">
      <style:paragraph-properties fo:text-align="center" style:justify-single-word="false"/>
      <style:text-properties fo:color="#2563eb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ea580c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146" style:family="paragraph" style:parent-style-name="Standard">
      <loext:graphic-properties draw:fill="solid" draw:fill-color="#eff6ff"/>
      <style:paragraph-properties fo:margin-left="0.635cm" fo:margin-right="0.635cm" fo:margin-top="0.176cm" fo:margin-bottom="0.176cm" style:contextual-spacing="false" fo:text-indent="0cm" style:auto-text-indent="false" fo:background-color="#eff6ff" fo:padding-left="0.282cm" fo:padding-right="0cm" fo:padding-top="0cm" fo:padding-bottom="0cm" fo:border-left="2.49pt solid #1b3a6b" fo:border-right="none" fo:border-top="none" fo:border-bottom="none"/>
      <style:text-properties fo:color="#1b3a6b" loext:opacity="100%" style:font-name="Arial" fo:font-size="11pt" fo:font-weight="bold" officeooo:paragraph-rsid="01205b64" style:font-name-asian="Arial1" style:font-size-asian="11pt" style:font-weight-asian="bold" style:font-name-complex="Arial1" style:font-size-complex="11pt" style:font-weight-complex="bold"/>
    </style:style>
    <style:style style:name="P147" style:family="paragraph" style:parent-style-name="Standard">
      <style:paragraph-properties fo:margin-top="0.353cm" fo:margin-bottom="0.353cm" style:contextual-spacing="false"/>
      <style:text-properties officeooo:paragraph-rsid="01205b64"/>
    </style:style>
    <style:style style:name="P148" style:family="paragraph" style:parent-style-name="Standard">
      <loext:graphic-properties draw:fill="solid" draw:fill-color="#1b3a6b"/>
      <style:paragraph-properties fo:margin-top="0.141cm" fo:margin-bottom="0.141cm" style:contextual-spacing="false" fo:text-align="center" style:justify-single-word="false" fo:background-color="#1b3a6b"/>
      <style:text-properties fo:color="#ffffff" loext:opacity="100%" style:font-name="Courier New" fo:font-size="15pt" fo:font-weight="bold" style:font-name-asian="Courier New1" style:font-size-asian="15pt" style:font-weight-asian="bold" style:font-name-complex="Courier New1" style:font-size-complex="15pt" style:font-weight-complex="bold"/>
    </style:style>
    <style:style style:name="P149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ffcdd2" loext:opacity="100%" style:font-name="Courier New" fo:font-size="10pt" fo:font-weight="bold" fo:background-color="#b71c1c" style:font-name-asian="Courier New1" style:font-size-asian="10pt" style:font-weight-asian="bold" style:font-name-complex="Courier New1" style:font-size-complex="10pt" style:font-weight-complex="bold"/>
    </style:style>
    <style:style style:name="P150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0d9488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52" style:family="paragraph" style:parent-style-name="Standard">
      <style:paragraph-properties fo:text-align="left" style:justify-single-word="false"/>
      <style:text-properties fo:color="#0d9488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2563eb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54" style:family="paragraph" style:parent-style-name="Standard">
      <style:paragraph-properties fo:text-align="left" style:justify-single-word="false"/>
      <style:text-properties fo:color="#2563eb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155" style:family="paragraph" style:parent-style-name="Standard">
      <style:paragraph-properties fo:text-align="center" style:justify-single-word="false"/>
      <style:text-properties fo:color="#7c3aed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56" style:family="paragraph" style:parent-style-name="Standard">
      <style:paragraph-properties fo:text-align="left" style:justify-single-word="false"/>
      <style:text-properties fo:color="#7c3aed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157" style:family="paragraph" style:parent-style-name="Standard">
      <loext:graphic-properties draw:fill="solid" draw:fill-color="#f5f3ff"/>
      <style:paragraph-properties fo:margin-top="0.141cm" fo:margin-bottom="0.141cm" style:contextual-spacing="false" fo:text-align="center" style:justify-single-word="false" fo:background-color="#f5f3ff"/>
      <style:text-properties fo:color="#7c3aed" loext:opacity="100%" style:font-name="Courier New" fo:font-size="13pt" fo:font-weight="bold" style:font-name-asian="Courier New1" style:font-size-asian="13pt" style:font-weight-asian="bold" style:font-name-complex="Courier New1" style:font-size-complex="13pt" style:font-weight-complex="bold"/>
    </style:style>
    <style:style style:name="P158" style:family="paragraph" style:parent-style-name="Standard">
      <style:paragraph-properties fo:text-align="left" style:justify-single-word="false"/>
      <style:text-properties fo:color="#1b3a6b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0d9488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16a34a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dc2626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ea580c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163" style:family="paragraph" style:parent-style-name="Standard">
      <style:text-properties fo:color="#dc2626" loext:opacity="100%" style:font-name="Arial" fo:font-size="10.5pt" style:font-name-asian="Arial1" style:font-size-asian="10.5pt" style:font-name-complex="Arial1" style:font-size-complex="10.5pt"/>
    </style:style>
    <style:style style:name="P164" style:family="paragraph" style:parent-style-name="Standard">
      <style:text-properties fo:color="#1f2937" loext:opacity="100%" style:font-name="Arial" fo:font-size="11pt" style:font-name-asian="Arial1" style:font-size-asian="11pt" style:font-name-complex="Arial1" style:font-size-complex="11pt"/>
    </style:style>
    <style:style style:name="P165" style:family="paragraph" style:parent-style-name="Standard">
      <style:paragraph-properties fo:text-align="center" style:justify-single-word="false"/>
      <style:text-properties fo:color="#ea580c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1b3a6b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dc2626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169" style:family="paragraph" style:parent-style-name="Standard">
      <style:paragraph-properties fo:margin-top="0.053cm" fo:margin-bottom="0.053cm" style:contextual-spacing="false"/>
      <style:text-properties fo:color="#0d9488" loext:opacity="100%" style:font-name="Courier New" fo:font-size="10pt" style:font-name-asian="Courier New1" style:font-size-asian="10pt" style:font-name-complex="Courier New1" style:font-size-complex="10pt"/>
    </style:style>
    <style:style style:name="P170" style:family="paragraph" style:parent-style-name="Standard">
      <style:paragraph-properties fo:margin-top="0.053cm" fo:margin-bottom="0.053cm" style:contextual-spacing="false"/>
    </style:style>
    <style:style style:name="P171" style:family="paragraph" style:parent-style-name="Standard">
      <style:paragraph-properties fo:margin-top="0.053cm" fo:margin-bottom="0.053cm" style:contextual-spacing="false"/>
      <style:text-properties fo:color="#7c3aed" loext:opacity="100%" style:font-name="Arial" fo:font-size="10pt" style:font-name-asian="Arial1" style:font-size-asian="10pt" style:font-name-complex="Arial1" style:font-size-complex="10pt"/>
    </style:style>
    <style:style style:name="P172" style:family="paragraph" style:parent-style-name="Standard">
      <style:paragraph-properties fo:margin-top="0.053cm" fo:margin-bottom="0.053cm" style:contextual-spacing="false"/>
      <style:text-properties fo:color="#ea580c" loext:opacity="100%" style:font-name="Courier New" fo:font-size="9.5pt" style:font-name-asian="Courier New1" style:font-size-asian="9.5pt" style:font-name-complex="Courier New1" style:font-size-complex="9.5pt"/>
    </style:style>
    <style:style style:name="P173" style:family="paragraph" style:parent-style-name="Standard">
      <style:paragraph-properties fo:margin-top="0.353cm" fo:margin-bottom="0cm" style:contextual-spacing="false" fo:text-align="center" style:justify-single-word="false" fo:padding-left="0cm" fo:padding-right="0cm" fo:padding-top="0.282cm" fo:padding-bottom="0cm" fo:border-left="none" fo:border-right="none" fo:border-top="0.51pt solid #dbeafe" fo:border-bottom="none"/>
    </style:style>
    <style:style style:name="T1" style:family="text">
      <style:text-properties fo:color="#6b7280" loext:opacity="100%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1b3a6b" loext:opacity="100%" style:font-name="Arial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T3" style:family="text">
      <style:text-properties fo:color="#2563eb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fo:color="#1b3a6b" loext:opacity="100%" style:font-name="Arial" fo:font-size="12pt" style:font-name-asian="Arial1" style:font-size-asian="12pt" style:font-name-complex="Arial1" style:font-size-complex="12pt"/>
    </style:style>
    <style:style style:name="T5" style:family="text">
      <style:text-properties fo:color="#18ffff" loext:opacity="100%" style:font-name="Arial" fo:font-size="12pt" fo:font-weight="bold" fo:background-color="#d500f9" loext:char-shading-value="0" style:font-name-asian="Arial1" style:font-size-asian="12pt" style:font-weight-asian="bold" style:font-name-complex="Arial1" style:font-size-complex="12pt" style:font-weight-complex="bold"/>
    </style:style>
    <style:style style:name="T6" style:family="text">
      <style:text-properties fo:color="#ffd740" loext:opacity="100%" style:font-name="Arial" fo:font-size="12pt" fo:font-weight="bold" fo:background-color="#4a4a4a" loext:char-shading-value="0" style:font-name-asian="Arial1" style:font-size-asian="12pt" style:font-weight-asian="bold" style:font-name-complex="Arial1" style:font-size-complex="12pt" style:font-weight-complex="bold"/>
    </style:style>
    <style:style style:name="T7" style:family="text">
      <style:text-properties fo:color="#ffff00" loext:opacity="100%" style:font-name="Arial" fo:font-size="12pt" fo:font-weight="bold" fo:background-color="#f50057" loext:char-shading-value="0" style:font-name-asian="Arial1" style:font-size-asian="12pt" style:font-weight-asian="bold" style:font-name-complex="Arial1" style:font-size-complex="12pt" style:font-weight-complex="bold"/>
    </style:style>
    <style:style style:name="T8" style:family="text">
      <style:text-properties fo:color="#1de9b6" loext:opacity="100%" style:font-name="Arial" fo:font-size="12pt" fo:font-weight="bold" fo:background-color="#4a4a4a" loext:char-shading-value="0" style:font-name-asian="Arial1" style:font-size-asian="12pt" style:font-weight-asian="bold" style:font-name-complex="Arial1" style:font-size-complex="12pt" style:font-weight-complex="bold"/>
    </style:style>
    <style:style style:name="T9" style:family="text">
      <style:text-properties style:font-name="Arial" fo:font-size="12pt" style:font-name-asian="Arial1" style:font-size-asian="12pt" style:font-name-complex="Arial1" style:font-size-complex="12pt"/>
    </style:style>
    <style:style style:name="T10" style:family="text">
      <style:text-properties fo:background-color="#ffff00" loext:char-shading-value="0"/>
    </style:style>
    <style:style style:name="T11" style:family="text">
      <style:text-properties fo:color="#18ffff" loext:opacity="100%" fo:background-color="#d500f9" loext:char-shading-value="0"/>
    </style:style>
    <style:style style:name="T12" style:family="text">
      <style:text-properties fo:color="#7c3aed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3" style:family="text">
      <style:text-properties fo:font-weight="bold" fo:background-color="#76ff03" loext:char-shading-value="0" style:font-weight-asian="bold" style:font-weight-complex="bold"/>
    </style:style>
    <style:style style:name="T14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5" style:family="text">
      <style:text-properties fo:font-weight="bold" fo:background-color="#ffd740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4a4a4a" loext:char-shading-value="0" style:font-weight-asian="bold" style:font-weight-complex="bold"/>
    </style:style>
    <style:style style:name="T17" style:family="text">
      <style:text-properties fo:background-color="#18ffff" loext:char-shading-value="0"/>
    </style:style>
    <style:style style:name="T18" style:family="text">
      <style:text-properties style:font-name="Arial" fo:font-size="12pt" fo:background-color="#ffd740" loext:char-shading-value="0" style:font-name-asian="Arial1" style:font-size-asian="12pt" style:font-name-complex="Arial1" style:font-size-complex="12pt"/>
    </style:style>
    <style:style style:name="T19" style:family="text">
      <style:text-properties fo:color="#2563eb" loext:opacity="100%" style:font-name="Arial" fo:font-size="12pt" fo:font-weight="bold" fo:background-color="#ffd740" loext:char-shading-value="0" style:font-name-asian="Arial1" style:font-size-asian="12pt" style:font-weight-asian="bold" style:font-name-complex="Arial1" style:font-size-complex="12pt" style:font-weight-complex="bold"/>
    </style:style>
    <style:style style:name="T20" style:family="text">
      <style:text-properties fo:color="#ea580c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21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22" style:family="text">
      <style:text-properties fo:color="#ffff00" loext:opacity="100%" fo:font-weight="bold" style:font-weight-asian="bold" style:font-weight-complex="bold"/>
    </style:style>
    <style:style style:name="T23" style:family="text">
      <style:text-properties fo:color="#ffd740" loext:opacity="100%" fo:font-weight="bold" style:font-weight-asian="bold" style:font-weight-complex="bold"/>
    </style:style>
    <style:style style:name="T24" style:family="text">
      <style:text-properties fo:background-color="#76ff03" loext:char-shading-value="0"/>
    </style:style>
    <style:style style:name="T25" style:family="text">
      <style:text-properties fo:color="#0d9488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8" style:family="text">
      <style:text-properties fo:background-color="#ffffff" loext:char-shading-value="0"/>
    </style:style>
    <style:style style:name="T29" style:family="text">
      <style:text-properties fo:color="#76ff03" loext:opacity="100%" fo:font-weight="bold" fo:background-color="#4a4a4a" loext:char-shading-value="0" style:font-weight-asian="bold" style:font-weight-complex="bold"/>
    </style:style>
    <style:style style:name="T30" style:family="text">
      <style:text-properties fo:color="#dc2626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1" style:family="text">
      <style:text-properties fo:color="#1f2937" loext:opacity="100%" style:font-name="Arial" fo:font-size="11pt" style:font-name-asian="Arial1" style:font-size-asian="11pt" style:font-name-complex="Arial1" style:font-size-complex="11pt"/>
    </style:style>
    <style:style style:name="T32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33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34" style:family="text">
      <style:text-properties fo:color="#00e5ff" loext:opacity="100%" fo:font-weight="bold" fo:background-color="#ffff00" loext:char-shading-value="0" style:font-weight-asian="bold" style:font-weight-complex="bold"/>
    </style:style>
    <style:style style:name="T35" style:family="text">
      <style:text-properties fo:color="#76ff03" loext:opacity="100%" fo:font-weight="bold" fo:background-color="#d500f9" loext:char-shading-value="0" style:font-weight-asian="bold" style:font-weight-complex="bold"/>
    </style:style>
    <style:style style:name="T36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37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38" style:family="text">
      <style:text-properties fo:color="#000000" loext:opacity="100%" fo:font-weight="bold" fo:background-color="#ffab40" loext:char-shading-value="0" style:font-weight-asian="bold" style:font-weight-complex="bold"/>
    </style:style>
    <style:style style:name="T39" style:family="text">
      <style:text-properties fo:color="#0d9488" loext:opacity="100%" style:font-name="Arial" fo:font-size="12pt" fo:font-weight="bold" fo:background-color="#ffff00" loext:char-shading-value="0" style:font-name-asian="Arial1" style:font-size-asian="12pt" style:font-weight-asian="bold" style:font-name-complex="Arial1" style:font-size-complex="12pt" style:font-weight-complex="bold"/>
    </style:style>
    <style:style style:name="T40" style:family="text">
      <style:text-properties fo:color="#000000" loext:opacity="100%" fo:font-weight="bold" fo:background-color="#76ff03" loext:char-shading-value="0" style:font-weight-asian="bold" style:font-weight-complex="bold"/>
    </style:style>
    <style:style style:name="T41" style:family="text">
      <style:text-properties fo:color="#76ff03" loext:opacity="100%" fo:font-weight="bold" fo:background-color="#ff9100" loext:char-shading-value="0" style:font-weight-asian="bold" style:font-weight-complex="bold"/>
    </style:style>
    <style:style style:name="T42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3" style:family="text">
      <style:text-properties fo:font-weight="bold" fo:background-color="#ff9100" loext:char-shading-value="0" style:font-weight-asian="bold" style:font-weight-complex="bold"/>
    </style:style>
    <style:style style:name="T44" style:family="text">
      <style:text-properties fo:color="#d97706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45" style:family="text">
      <style:text-properties fo:color="#d97706" loext:opacity="100%" fo:font-family="Arial" style:font-family-generic="swiss" style:font-pitch="variable" fo:font-size="11pt" fo:font-weight="bold" style:font-family-asian="Arial" style:font-family-generic-asian="swiss" style:font-pitch-asian="variable" style:font-size-asian="11pt" style:font-weight-asian="bold" style:font-name-complex="Arial1" style:font-size-complex="11pt" style:font-weight-complex="bold"/>
    </style:style>
    <style:style style:name="T46" style:family="text">
      <style:text-properties fo:color="#1f2937" loext:opacity="100%" fo:font-family="Arial" style:font-family-generic="swiss" style:font-pitch="variable" fo:font-size="11pt" fo:background-color="#ffff00" loext:char-shading-value="0" style:font-family-asian="Arial" style:font-family-generic-asian="swiss" style:font-pitch-asian="variable" style:font-size-asian="11pt" style:font-name-complex="Arial1" style:font-size-complex="11pt"/>
    </style:style>
    <style:style style:name="T47" style:family="text">
      <style:text-properties fo:color="#1f2937" loext:opacity="100%" fo:font-family="Arial" style:font-family-generic="swiss" style:font-pitch="variable" fo:font-size="11pt" style:font-family-asian="Arial" style:font-family-generic-asian="swiss" style:font-pitch-asian="variable" style:font-size-asian="11pt" style:font-name-complex="Arial1" style:font-size-complex="11pt"/>
    </style:style>
    <style:style style:name="T48" style:family="text">
      <style:text-properties fo:color="#ffd740" loext:opacity="100%" fo:font-family="Arial" style:font-family-generic="swiss" style:font-pitch="variable" fo:font-size="11pt" fo:font-weight="bold" fo:background-color="#ff1744" loext:char-shading-value="0" style:font-family-asian="Arial" style:font-family-generic-asian="swiss" style:font-pitch-asian="variable" style:font-size-asian="11pt" style:font-weight-asian="bold" style:font-name-complex="Arial1" style:font-size-complex="11pt" style:font-weight-complex="bold"/>
    </style:style>
    <style:style style:name="T49" style:family="text">
      <style:text-properties fo:color="#18ffff" loext:opacity="100%" fo:font-family="Arial" style:font-family-generic="swiss" style:font-pitch="variable" fo:font-size="11pt" fo:font-weight="bold" fo:background-color="#d500f9" loext:char-shading-value="0" style:font-family-asian="Arial" style:font-family-generic-asian="swiss" style:font-pitch-asian="variable" style:font-size-asian="11pt" style:font-weight-asian="bold" style:font-name-complex="Arial1" style:font-size-complex="11pt" style:font-weight-complex="bold"/>
    </style:style>
    <style:style style:name="T50" style:family="text">
      <style:text-properties fo:color="#ffff00" loext:opacity="100%"/>
    </style:style>
    <style:style style:name="T51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bold" fo:background-color="#000000" loext:char-shading-value="0" style:font-weight-asian="bold" style:font-weight-complex="bold"/>
    </style:style>
    <style:style style:name="T54" style:family="text">
      <style:text-properties fo:color="#e0e0e0" loext:opacity="100%" fo:font-weight="bold" fo:background-color="#ff4081" loext:char-shading-value="0" style:font-weight-asian="bold" style:font-weight-complex="bold"/>
    </style:style>
    <style:style style:name="T55" style:family="text">
      <style:text-properties fo:font-weight="normal" fo:background-color="#000000" loext:char-shading-value="0" style:font-weight-asian="normal" style:font-weight-complex="normal"/>
    </style:style>
    <style:style style:name="T56" style:family="text">
      <style:text-properties fo:color="#ea580c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7" style:family="text">
      <style:text-properties fo:color="#ea580c" loext:opacity="100%" style:font-name="Arial" fo:font-size="11pt" fo:font-weight="bold" fo:background-color="#ffff00" loext:char-shading-value="0" style:font-name-asian="Arial1" style:font-size-asian="11pt" style:font-weight-asian="bold" style:font-name-complex="Arial1" style:font-size-complex="11pt" style:font-weight-complex="bold"/>
    </style:style>
    <style:style style:name="T58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59" style:family="text">
      <style:text-properties fo:color="#76ff03" loext:opacity="100%" fo:font-weight="bold" style:font-weight-asian="bold" style:font-weight-complex="bold"/>
    </style:style>
    <style:style style:name="T60" style:family="text">
      <style:text-properties fo:background-color="#ffd740" loext:char-shading-value="0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2563eb" loext:opacity="100%" style:font-name="Arial" fo:font-size="12pt" fo:font-weight="bold" fo:background-color="#ffff00" loext:char-shading-value="0" style:font-name-asian="Arial1" style:font-size-asian="12pt" style:font-weight-asian="bold" style:font-name-complex="Arial1" style:font-size-complex="12pt" style:font-weight-complex="bold"/>
    </style:style>
    <style:style style:name="T63" style:family="text">
      <style:text-properties fo:color="#ff4081" loext:opacity="100%" fo:font-weight="bold" fo:background-color="#76ff03" loext:char-shading-value="0" style:font-weight-asian="bold" style:font-weight-complex="bold"/>
    </style:style>
    <style:style style:name="T64" style:family="text">
      <style:text-properties fo:color="#0d9488" loext:opacity="100%" style:font-name="Arial" fo:font-size="12pt" fo:font-weight="bold" fo:background-color="#ffd740" loext:char-shading-value="0" style:font-name-asian="Arial1" style:font-size-asian="12pt" style:font-weight-asian="bold" style:font-name-complex="Arial1" style:font-size-complex="12pt" style:font-weight-complex="bold"/>
    </style:style>
    <style:style style:name="T65" style:family="text">
      <style:text-properties fo:font-weight="bold" fo:background-color="#f48fb1" loext:char-shading-value="0" style:font-weight-asian="bold" style:font-weight-complex="bold"/>
    </style:style>
    <style:style style:name="T66" style:family="text">
      <style:text-properties fo:color="#dc2626" loext:opacity="100%" style:font-name="Arial" fo:font-size="12pt" fo:font-weight="bold" fo:background-color="#ffff00" loext:char-shading-value="0" style:font-name-asian="Arial1" style:font-size-asian="12pt" style:font-weight-asian="bold" style:font-name-complex="Arial1" style:font-size-complex="12pt" style:font-weight-complex="bold"/>
    </style:style>
    <style:style style:name="T67" style:family="text">
      <style:text-properties fo:color="#dc2626" loext:opacity="100%" style:font-name="Arial" fo:font-size="12pt" fo:font-weight="bold" fo:background-color="#18ffff" loext:char-shading-value="0" style:font-name-asian="Arial1" style:font-size-asian="12pt" style:font-weight-asian="bold" style:font-name-complex="Arial1" style:font-size-complex="12pt" style:font-weight-complex="bold"/>
    </style:style>
    <style:style style:name="T68" style:family="text">
      <style:text-properties fo:color="#dc2626" loext:opacity="100%" style:font-name="Arial" fo:font-size="12pt" fo:font-weight="bold" fo:background-color="#d1c4e9" loext:char-shading-value="0" style:font-name-asian="Arial1" style:font-size-asian="12pt" style:font-weight-asian="bold" style:font-name-complex="Arial1" style:font-size-complex="12pt" style:font-weight-complex="bold"/>
    </style:style>
    <style:style style:name="T69" style:family="text">
      <style:text-properties fo:color="#1de9b6" loext:opacity="100%" fo:font-weight="bold" fo:background-color="#5d4037" loext:char-shading-value="0" style:font-weight-asian="bold" style:font-weight-complex="bold"/>
    </style:style>
    <style:style style:name="T70" style:family="text">
      <style:text-properties fo:color="#f06292" loext:opacity="100%" fo:font-weight="bold" fo:background-color="#ffff00" loext:char-shading-value="0" style:font-weight-asian="bold" style:font-weight-complex="bold"/>
    </style:style>
    <style:style style:name="T71" style:family="text">
      <style:text-properties fo:color="#16a34a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72" style:family="text">
      <style:text-properties fo:background-color="#1de9b6" loext:char-shading-value="0"/>
    </style:style>
    <style:style style:name="T73" style:family="text">
      <style:text-properties fo:background-color="#fff176" loext:char-shading-value="0"/>
    </style:style>
    <style:style style:name="T74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75" style:family="text">
      <style:text-properties fo:color="#ffff00" loext:opacity="100%" fo:font-weight="bold" fo:background-color="#4e342e" loext:char-shading-value="0" style:font-weight-asian="bold" style:font-weight-complex="bold"/>
    </style:style>
    <style:style style:name="T76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77" style:family="text">
      <style:text-properties fo:color="#ffff00" loext:opacity="100%" fo:font-weight="bold" fo:background-color="#5d4037" loext:char-shading-value="0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80" style:family="text">
      <style:text-properties fo:color="#ffc400" loext:opacity="100%"/>
    </style:style>
    <style:style style:name="T8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82" style:family="text">
      <style:text-properties fo:color="#000000" loext:opacity="100%" fo:font-weight="bold" fo:background-color="#ffd740" loext:char-shading-value="0" style:font-weight-asian="bold" style:font-weight-complex="bold"/>
    </style:style>
    <style:style style:name="T83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84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85" style:family="text">
      <style:text-properties fo:font-weight="bold" fo:background-color="#18ffff" loext:char-shading-value="0" style:font-weight-asian="bold" style:font-weight-complex="bold"/>
    </style:style>
    <style:style style:name="T86" style:family="text">
      <style:text-properties fo:color="#1b3a6b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87" style:family="text">
      <style:text-properties fo:color="#ffd740" loext:opacity="100%" fo:background-color="#f50057" loext:char-shading-value="0"/>
    </style:style>
    <style:style style:name="T88" style:family="text">
      <style:text-properties fo:color="#6b7280" loext:opacity="100%" style:font-name="Arial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89" style:family="text">
      <style:text-properties fo:color="#1b3a6b" loext:opacity="100%" style:font-name="Arial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>演算法時間複雜度</text:p>
      <text:p text:style-name="P3">Big-O Notation 超白話完整筆記（最終完整版）</text:p>
      <text:p text:style-name="P4">從零開始・遞迴展開・考題精析・絕不省略</text:p>
      <text:p text:style-name="P5"><text:s/></text:p>
      <text:p text:style-name="P6"/>
      <text:p text:style-name="P7"><text:span text:style-name="T1">第一章 <text:s/></text:span><text:span text:style-name="T2">什麼是 Big-O？</text:span></text:p>
      <text:p text:style-name="P8"/>
      <text:p text:style-name="P9"><text:span text:style-name="T3">核心定義：</text:span><text:span text:style-name="T4">Big-O 描述「</text:span><text:span text:style-name="T5">資料量變大</text:span><text:span text:style-name="T6">時，</text:span><text:span text:style-name="T7">演算法工作量</text:span><text:span text:style-name="T8">增加的速度</text:span><text:span text:style-name="T4">」。不看實際秒數，只看成長趨勢，常數與低階項可忽略。</text:span></text:p>
      <text:p text:style-name="P10"/>
      <text:p text:style-name="P11"><text:span text:style-name="T9">📊 <text:s/></text:span><text:span text:style-name="T3">完整複雜度排序表（由快到慢）</text:span></text:p>
      <text:p text:style-name="P8"/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 table:style-name="表格1.1">
            <table:table-cell table:style-name="表格1.A1" office:value-type="string">
              <text:p text:style-name="P12">複雜度</text:p>
            </table:table-cell>
            <table:table-cell table:style-name="表格1.A1" office:value-type="string">
              <text:p text:style-name="P12">名稱</text:p>
            </table:table-cell>
            <table:table-cell table:style-name="表格1.A1" office:value-type="string">
              <text:p text:style-name="P12">典型例子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13">O(1)</text:p>
          </table:table-cell>
          <table:table-cell table:style-name="表格1.B2" office:value-type="string">
            <text:p text:style-name="P14">固定時間</text:p>
          </table:table-cell>
          <table:table-cell table:style-name="表格1.C2" office:value-type="string">
            <text:p text:style-name="P15">陣列取元素、Hash 查找</text:p>
          </table:table-cell>
        </table:table-row>
        <table:table-row table:style-name="表格1.1">
          <table:table-cell table:style-name="表格1.A3" office:value-type="string">
            <text:p text:style-name="P16">O(log n)</text:p>
          </table:table-cell>
          <table:table-cell table:style-name="表格1.C2" office:value-type="string">
            <text:p text:style-name="P14">對數時間</text:p>
          </table:table-cell>
          <table:table-cell table:style-name="表格1.C2" office:value-type="string">
            <text:p text:style-name="P15">Binary Search</text:p>
          </table:table-cell>
        </table:table-row>
        <table:table-row table:style-name="表格1.1">
          <table:table-cell table:style-name="表格1.A3" office:value-type="string">
            <text:p text:style-name="P17">O(n)</text:p>
          </table:table-cell>
          <table:table-cell table:style-name="表格1.B2" office:value-type="string">
            <text:p text:style-name="P14">線性時間</text:p>
          </table:table-cell>
          <table:table-cell table:style-name="表格1.C2" office:value-type="string">
            <text:p text:style-name="P15">線性搜尋、掃描一遍</text:p>
          </table:table-cell>
        </table:table-row>
        <table:table-row table:style-name="表格1.1">
          <table:table-cell table:style-name="表格1.A5" office:value-type="string">
            <text:p text:style-name="P18">O(n log n)</text:p>
          </table:table-cell>
          <table:table-cell table:style-name="表格1.C2" office:value-type="string">
            <text:p text:style-name="P14">線性對數</text:p>
          </table:table-cell>
          <table:table-cell table:style-name="表格1.C2" office:value-type="string">
            <text:p text:style-name="P15">Merge Sort、Quick Sort 平均</text:p>
          </table:table-cell>
        </table:table-row>
        <table:table-row table:style-name="表格1.1">
          <table:table-cell table:style-name="表格1.A6" office:value-type="string">
            <text:p text:style-name="P19">O(<text:span text:style-name="T10">n²</text:span>)</text:p>
          </table:table-cell>
          <table:table-cell table:style-name="表格1.B2" office:value-type="string">
            <text:p text:style-name="P14">平方時間</text:p>
          </table:table-cell>
          <table:table-cell table:style-name="表格1.C2" office:value-type="string">
            <text:p text:style-name="P15">雙層迴圈、Bubble Sort</text:p>
          </table:table-cell>
        </table:table-row>
        <table:table-row table:style-name="表格1.1">
          <table:table-cell table:style-name="表格1.A7" office:value-type="string">
            <text:p text:style-name="P20">O(<text:span text:style-name="T10">2ⁿ</text:span>)</text:p>
          </table:table-cell>
          <table:table-cell table:style-name="表格1.C2" office:value-type="string">
            <text:p text:style-name="P14">指數時間</text:p>
          </table:table-cell>
          <table:table-cell table:style-name="表格1.C2" office:value-type="string">
            <text:p text:style-name="P15">所有子集合枚舉</text:p>
          </table:table-cell>
        </table:table-row>
        <table:table-row table:style-name="表格1.1">
          <table:table-cell table:style-name="表格1.A7" office:value-type="string">
            <text:p text:style-name="P20">O(<text:span text:style-name="T10">n!</text:span>)</text:p>
          </table:table-cell>
          <table:table-cell table:style-name="表格1.B2" office:value-type="string">
            <text:p text:style-name="P14">階乘時間</text:p>
          </table:table-cell>
          <table:table-cell table:style-name="表格1.C2" office:value-type="string">
            <text:p text:style-name="P15">所有排列枚舉</text:p>
          </table:table-cell>
        </table:table-row>
      </table:table>
      <text:p text:style-name="P10"/>
      <text:p text:style-name="P21">必背排序：O(1) &lt; O(log n) &lt; O(n) &lt; O(n log n) &lt;<text:span text:style-name="T11"> O(n²) &lt; O(2ⁿ) &lt; O(n!)</text:span></text:p>
      <text:p text:style-name="P10"/>
      <text:p text:style-name="P11"><text:span text:style-name="T9">💡 <text:s/></text:span><text:span text:style-name="T12">Big-O vs Θ(theta)：有什麼差別？</text:span></text:p>
      <text:list text:style-name="WWNum2">
        <text:list-item text:start-value="1">
          <text:p text:style-name="P22">O(n²)：「最多<text:span text:style-name="T13">不超過</text:span> n² 等級」，是<text:span text:style-name="T14">上界</text:span>，不一定精確</text:p>
        </text:list-item>
        <text:list-item>
          <text:p text:style-name="P22">Θ(n²)：「真的<text:span text:style-name="T15">就是</text:span> n² 等級」，<text:span text:style-name="T16">精確描述</text:span>，上下界都是</text:p>
        </text:list-item>
      </text:list>
      <text:p text:style-name="P23">例：3n²+5n+1，可說 O(n²)（上界），也可更精確說 Θ(n²)（精確值）。考試以 Big-O 為主。</text:p>
      <text:p text:style-name="P24"/>
      <text:p text:style-name="P7"><text:span text:style-name="T1">第二章 <text:s/></text:span><text:span text:style-name="T2">Big-O 化簡法則</text:span></text:p>
      <text:p text:style-name="P8"/>
      <text:p text:style-name="P11"><text:span text:style-name="T9">法則① <text:s/></text:span><text:span text:style-name="T3">只保留最高次項</text:span></text:p>
      <text:p text:style-name="P25"><text:span text:style-name="T10">n 無限大時，低次項影響消失</text:span>，<text:span text:style-name="T17">直接丟棄</text:span>。</text:p>
      <text:p text:style-name="P26"><text:soft-page-break/>2022·n·log n <text:s/>+ <text:s/>111n <text:s/>+ <text:s/>0.001</text:p>
      <text:p text:style-name="P27"><text:s text:c="12"/>↓ <text:s/>只留最大項</text:p>
      <text:p text:style-name="P28"><text:s text:c="9"/>O(n log n)</text:p>
      <text:p text:style-name="P10"/>
      <text:p text:style-name="P11"><text:span text:style-name="T9">法則② <text:s/></text:span><text:span text:style-name="T3">忽略常數倍數</text:span></text:p>
      <text:p text:style-name="P25">係數不影響成長速度，Big-O 一律視為同等級。</text:p>
      <text:p text:style-name="P29">1000n = O(n) <text:s text:c="7"/>2022·n·log n = O(n log n) <text:s text:c="7"/>n²/4 = O(n²)</text:p>
      <text:p text:style-name="P10"/>
      <text:p text:style-name="P11"><text:span text:style-name="T9">法則③ </text:span><text:span text:style-name="T18"><text:s/></text:span><text:span text:style-name="T19">指數成長遠大於多項式</text:span></text:p>
      <text:p text:style-name="P25">n = 100 時：n³ = 1,000,000；2ⁿ = 天文數字（1兆兆兆...）。</text:p>
      <text:p text:style-name="P30">成長速度：n! &gt;&gt;<text:span text:style-name="T10"> 2ⁿ &gt;&gt; n³ &gt;&gt; n²</text:span> &gt;&gt; n log n &gt;&gt; n &gt;&gt; log n &gt;&gt; 1</text:p>
      <text:p text:style-name="P10"/>
      <text:p text:style-name="P11"><text:span text:style-name="T9">法則④ <text:s/></text:span><text:span text:style-name="T20">√n 與 log n 的大小比較（高頻考點）</text:span></text:p>
      <text:p text:style-name="P25">這是考試常考但容易忽略的概念：</text:p>
      <text:p text:style-name="P26">n → ∞ 時：√n &gt;&gt; log n</text:p>
      <text:p text:style-name="P27">例 n=1,000,000：√n = 1000，log₂n ≈ 20</text:p>
      <text:p text:style-name="P28">→ 含 <text:span text:style-name="T21">√n 的項永遠比含 log n 的項大</text:span></text:p>
      <text:p text:style-name="P8"/>
      <text:p text:style-name="P31">因此在化簡含 √n 和 log n 的式子時：</text:p>
      <text:p text:style-name="P26">T(n) = 3n² +<text:span text:style-name="T22"> 7n²√n + n²log n</text:span></text:p>
      <text:p text:style-name="P27">最高次項：n²√n（因為 <text:span text:style-name="T23">√n &gt; log n</text:span>）</text:p>
      <text:p text:style-name="P28">→ O(n²√n)</text:p>
      <text:p text:style-name="P8"/>
      <text:p text:style-name="P32">記憶法：複雜度大小 → 1 &lt;<text:span text:style-name="T24"> log n &lt; √n </text:span>&lt; n &lt; n log n &lt; n²</text:p>
      <text:p text:style-name="P24"/>
      <text:p text:style-name="P7"><text:span text:style-name="T1">第三章 <text:s/></text:span><text:span text:style-name="T2">等差級數 / 等比級數完整推導</text:span></text:p>
      <text:p text:style-name="P8"/>
      <text:p text:style-name="P11"><text:span text:style-name="T9">📐 <text:s/></text:span><text:span text:style-name="T25">等差級數推導（超高頻）</text:span></text:p>
      <text:p text:style-name="P25">遇到「內圈跑 1, 2, 3, ..., n 次」就需要這個公式。</text:p>
      <text:p text:style-name="P26">正向：S = 1 + 2 + 3 + ... + n</text:p>
      <text:p text:style-name="P27">反向：S = n + (n-1) + (n-2) + ... + 1</text:p>
      <text:p text:style-name="P27">相加：2S = (n+1) × n 組 = n(n+1)</text:p>
      <text:p text:style-name="P28">結果：S = n(n+1)/2 <text:s/>≈ <text:s/>n²/2 <text:s/>→ <text:s/>O(n²)</text:p>
      <text:p text:style-name="P8"/>
      <text:p text:style-name="P33">等差級數：1+2+3+...+n = n(n+1)/2 ≈ n²/2 → O(n²)</text:p>
      <text:p text:style-name="P34"/>
      <text:p text:style-name="P11"><text:span text:style-name="T9">📈 <text:s/></text:span><text:span text:style-name="T12">等比級數推導</text:span></text:p>
      <text:p text:style-name="P25">遇到「每次乘 2 的累加」就是等比級數。</text:p>
      <text:p text:style-name="P26">1 + 2 + 4 + 8 + ... + 2ⁿ = 2^(n+1) - 1 <text:s/>→ <text:s/>O(2ⁿ)</text:p>
      <text:p text:style-name="P28">（應用：n 個物品各自選/不選，共 2ⁿ 種組合）</text:p>
      <text:p text:style-name="P24"/>
      <text:p text:style-name="P7"><text:soft-page-break/><text:span text:style-name="T1">第四章 <text:s/></text:span><text:span text:style-name="T2">看到迴圈立刻判斷 Big-O</text:span></text:p>
      <text:p text:style-name="P8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12">迴圈寫法</text:p>
            </table:table-cell>
            <table:table-cell table:style-name="表格2.A1" office:value-type="string">
              <text:p text:style-name="P12">思考方式</text:p>
            </table:table-cell>
            <table:table-cell table:style-name="表格2.A1" office:value-type="string">
              <text:p text:style-name="P12">Big-O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35">for(i=0; i&lt;n; i++)</text:p>
          </table:table-cell>
          <table:table-cell table:style-name="表格2.B2" office:value-type="string">
            <text:p text:style-name="P15">單層，每次 +1</text:p>
          </table:table-cell>
          <table:table-cell table:style-name="表格2.C2" office:value-type="string">
            <text:p text:style-name="P13">O(<text:span text:style-name="T10">n</text:span>)</text:p>
          </table:table-cell>
        </table:table-row>
        <table:table-row table:style-name="表格2.1">
          <table:table-cell table:style-name="表格2.A2" office:value-type="string">
            <text:p text:style-name="P35">for(i=0;i&lt;n;i++) { for(j=0;j&lt;<text:span text:style-name="T26">n</text:span>;j++) }</text:p>
          </table:table-cell>
          <table:table-cell table:style-name="表格2.B2" office:value-type="string">
            <text:p text:style-name="P15">雙層，各跑 n 次</text:p>
          </table:table-cell>
          <table:table-cell table:style-name="表格2.C3" office:value-type="string">
            <text:p text:style-name="P19">O(<text:span text:style-name="T10">n²</text:span>)</text:p>
          </table:table-cell>
        </table:table-row>
        <table:table-row table:style-name="表格2.1">
          <table:table-cell table:style-name="表格2.A2" office:value-type="string">
            <text:p text:style-name="P35">for(i=0;i&lt;n;i++) { for(j=0;j&lt;<text:span text:style-name="T26">i</text:span>;j++) }</text:p>
          </table:table-cell>
          <table:table-cell table:style-name="表格2.B2" office:value-type="string">
            <text:p text:style-name="P15">內圈跑 i 次，等差累加</text:p>
          </table:table-cell>
          <table:table-cell table:style-name="表格2.C3" office:value-type="string">
            <text:p text:style-name="P19">O(<text:span text:style-name="T10">n²</text:span>)</text:p>
          </table:table-cell>
        </table:table-row>
        <table:table-row table:style-name="表格2.1">
          <table:table-cell table:style-name="表格2.A2" office:value-type="string">
            <text:p text:style-name="P35">for(i=1; i&lt;n; <text:span text:style-name="T27">i*=2</text:span>)</text:p>
          </table:table-cell>
          <table:table-cell table:style-name="表格2.B2" office:value-type="string">
            <text:p text:style-name="P15">每次乘 2，<text:span text:style-name="T27">砍半原理</text:span></text:p>
          </table:table-cell>
          <table:table-cell table:style-name="表格2.C5" office:value-type="string">
            <text:p text:style-name="P16">O(log n)</text:p>
          </table:table-cell>
        </table:table-row>
        <table:table-row table:style-name="表格2.1">
          <table:table-cell table:style-name="表格2.A2" office:value-type="string">
            <text:p text:style-name="P35">while(n&gt;1) { <text:span text:style-name="T27">n/=2</text:span>; }</text:p>
          </table:table-cell>
          <table:table-cell table:style-name="表格2.B2" office:value-type="string">
            <text:p text:style-name="P15"><text:span text:style-name="T27">砍半</text:span>直到 1</text:p>
          </table:table-cell>
          <table:table-cell table:style-name="表格2.C5" office:value-type="string">
            <text:p text:style-name="P16">O(log n)</text:p>
          </table:table-cell>
        </table:table-row>
        <table:table-row table:style-name="表格2.1">
          <table:table-cell table:style-name="表格2.A2" office:value-type="string">
            <text:p text:style-name="P35">for(i=1;i&lt;n;<text:span text:style-name="T27">i*=2</text:span>) { for(j=0;j&lt;n;j++) }</text:p>
          </table:table-cell>
          <table:table-cell table:style-name="表格2.B2" office:value-type="string">
            <text:p text:style-name="P15"><text:span text:style-name="T27">外圈 log n</text:span>，內圈 n</text:p>
          </table:table-cell>
          <table:table-cell table:style-name="表格2.C7" office:value-type="string">
            <text:p text:style-name="P18">O(n <text:span text:style-name="T10">log n</text:span>)</text:p>
          </table:table-cell>
        </table:table-row>
      </table:table>
      <text:p text:style-name="P34">(<text:span text:style-name="T14">log 的本質</text:span><text:span text:style-name="T28">其實是</text:span>：<text:span text:style-name="T29">2 要乘幾次才會變成 n？</text:span>)</text:p>
      <text:p text:style-name="P11"><text:span text:style-name="T9">🔬 <text:s/></text:span><text:span text:style-name="T20">等差累加型：最常考的變形</text:span></text:p>
      <text:p text:style-name="P26">for(i=0; i&lt;n; i+=2) <text:s text:c="5"/>// 外圈跑 <text:span text:style-name="T26">n/2 </text:span>次</text:p>
      <text:p text:style-name="P27"><text:s text:c="4"/>for(j=0; j&lt;i; j++) <text:s text:c="2"/>// 內圈跑 <text:span text:style-name="T26">i</text:span> 次</text:p>
      <text:p text:style-name="P36"/>
      <text:p text:style-name="P27">次數 = 0+2+4+...+(n-2)</text:p>
      <text:p text:style-name="P27"><text:s text:c="4"/>= (n/2 項) × (n/2 的平均值 ≈ n/4)</text:p>
      <text:p text:style-name="P28"><text:s text:c="4"/>≈ n²/4 <text:s/>→ <text:s/>O(n²)</text:p>
      <text:p text:style-name="P8"/>
      <text:p text:style-name="P26">while(i&lt;n) { <text:s text:c="13"/>// i 從 0 遞增</text:p>
      <text:p text:style-name="P27"><text:s text:c="4"/>for(j=i; j&lt;=n; j++) <text:s/>// 內圈跑 n-i 次</text:p>
      <text:p text:style-name="P27"><text:s text:c="4"/>i++;</text:p>
      <text:p text:style-name="P27">}</text:p>
      <text:p text:style-name="P36"/>
      <text:p text:style-name="P28">次數 = n + (n-1) + (n-2) + ... + 1 = n(n+1)/2 <text:s/>→ <text:s/>O(n²)</text:p>
      <text:p text:style-name="P8"/>
      <text:p text:style-name="P32">記憶法：內圈跑 i 次 OR 內圈從 i 跑到 n → 等差累加 → O(n²)</text:p>
      <text:p text:style-name="P24"/>
      <text:p text:style-name="P7"><text:span text:style-name="T1">第五章 <text:s/></text:span><text:span text:style-name="T2">遞迴展開法（Recursion Expansion）</text:span></text:p>
      <text:p text:style-name="P8"/>
      <text:p text:style-name="P25">把遞迴式一層一層代入，直到看清楚它到底做了幾次工作。</text:p>
      <text:p text:style-name="P10"/>
      <text:p text:style-name="P11"><text:span text:style-name="T9">範例① <text:s/></text:span><text:span text:style-name="T30">T(n) = T(n-1) + n <text:s/>→ <text:s/>O(n²)</text:span></text:p>
      <text:p text:style-name="P26">T(n) <text:s text:c="2"/>= T(n-1) + n</text:p>
      <text:p text:style-name="P27">T(n-1) = T(n-2) + (n-1) <text:s text:c="3"/>代入↓</text:p>
      <text:p text:style-name="P27">T(n) <text:s text:c="2"/>= T(n-2) + (n-1) + n</text:p>
      <text:p text:style-name="P27">T(n-2) = T(n-3) + (n-2) <text:s text:c="3"/>繼續代入↓</text:p>
      <text:p text:style-name="P27">T(n) <text:s text:c="2"/>= T(n-3) + (n-2) + (n-1) + n</text:p>
      <text:p text:style-name="P27">...</text:p>
      <text:p text:style-name="P28">最終展開：T(n) = 1+2+3+...+n = n(n+1)/2 <text:s/>→ <text:s/>O(n²)</text:p>
      <text:p text:style-name="P8"/>
      <text:p text:style-name="P11"><text:span text:style-name="T9">範例② <text:s/></text:span><text:span text:style-name="T12">Q(n) = Q(n-1) + 2n-1 <text:s/>→ <text:s/>Q(n) = n²</text:span></text:p>
      <text:p text:style-name="P10"><text:soft-page-break/><text:span text:style-name="T31">這是「矩陣乘法次數分析」常見形式：</text:span></text:p>
      <text:p text:style-name="P26">Q(n) <text:s text:c="2"/>= Q(n-1) + (2n-1)</text:p>
      <text:p text:style-name="P27">Q(n-1) = Q(n-2) + (2n-3) <text:s text:c="3"/>代入↓</text:p>
      <text:p text:style-name="P27">Q(n) <text:s text:c="2"/>= Q(n-2) + (2n-3) + (2n-1)</text:p>
      <text:p text:style-name="P27">...繼續展開...</text:p>
      <text:p text:style-name="P27">Q(n) <text:s text:c="2"/>= 1 + 3 + 5 + ... + (2n-1)</text:p>
      <text:p text:style-name="P27"><text:s text:c="7"/>= n²（<text:span text:style-name="T21">奇數和公式</text:span>：<text:span text:style-name="T32">前 n 個奇數之和 = n²</text:span>）</text:p>
      <text:p text:style-name="P27">→ Q(n) = n² <text:s/>執行時間 T(n) = O(n)</text:p>
      <text:p text:style-name="P28"><text:s text:c="2"/>（因為每次只做固定工作，Q(n) 是乘法次數，T(n) 是執行時間）</text:p>
      <text:p text:style-name="P8"/>
      <text:p text:style-name="P11"><text:span text:style-name="T9">範例③ <text:s/></text:span><text:span text:style-name="T3">T(n) = T(n/2) + 1 <text:s/>→ <text:s/></text:span><text:span text:style-name="T19">O(log n)</text:span></text:p>
      <text:p text:style-name="P26">T(n) <text:s text:c="2"/>= T(n/2) <text:s text:c="2"/>+ 1</text:p>
      <text:p text:style-name="P27">T(n/2) = T(n/4) <text:s text:c="2"/>+ 1 <text:s text:c="3"/>代入↓</text:p>
      <text:p text:style-name="P27">T(n) <text:s text:c="2"/>= T(n/4) <text:s text:c="2"/>+ 1+1</text:p>
      <text:p text:style-name="P27">...</text:p>
      <text:p text:style-name="P27"><text:span text:style-name="T33">砍幾次後 n 變 1？</text:span><text:span text:style-name="T34">n/2^k=1 → k=log₂n</text:span></text:p>
      <text:p text:style-name="P28">所以<text:span text:style-name="T35">共 log n 層</text:span>，每層 1 個工作 <text:s/>→ <text:s/>O(log n)</text:p>
      <text:p text:style-name="P37">(規律：<text:span text:style-name="T10">每展開一次</text:span>，<text:span text:style-name="T36">問題規模砍半</text:span>，<text:span text:style-name="T24">多一個 +1</text:span>。那<text:span text:style-name="T10">到底有幾個 1？</text:span>這<text:span text:style-name="T37">取決於：什麼時候停止？通常遞迴會停在：</text:span><text:span text:style-name="T38">T(1)</text:span>)</text:p>
      <text:p text:style-name="P7"><text:span text:style-name="T1">第六章 <text:s/></text:span><text:span text:style-name="T2">遞迴樹（Recursion Tree）</text:span></text:p>
      <text:p text:style-name="P8"/>
      <text:p text:style-name="P25">把遞迴畫成樹，看每層工作量 × 總層數 = 總複雜度。</text:p>
      <text:p text:style-name="P10"/>
      <text:p text:style-name="P11"><text:span text:style-name="T9">🌲 <text:s/></text:span><text:span text:style-name="T25">Merge Sort：T(</text:span><text:span text:style-name="T39">n</text:span><text:span text:style-name="T25">) = 2T(</text:span><text:span text:style-name="T39">n/2</text:span><text:span text:style-name="T25">) + n</text:span></text:p>
      <text:p text:style-name="P26"><text:s text:c="10"/>n <text:s text:c="18"/>← 第1層，工作量=n</text:p>
      <text:p text:style-name="P27"><text:s text:c="7"/>/ <text:s text:c="4"/>\</text:p>
      <text:p text:style-name="P27"><text:s text:c="5"/>n/2 <text:s text:c="4"/>n/2 <text:s text:c="13"/>← 第2層，<text:span text:style-name="T40">工作量=n/2+n/2=n</text:span></text:p>
      <text:p text:style-name="P27"><text:s text:c="4"/>/ <text:s/>\ <text:s text:c="3"/>/ <text:s/>\</text:p>
      <text:p text:style-name="P27"><text:s text:c="2"/>n/4 n/4 n/4 n/4 <text:s text:c="11"/>← 第3層，<text:span text:style-name="T40">工作量=n/4×4=n</text:span></text:p>
      <text:p text:style-name="P27"><text:s text:c="2"/>... <text:s text:c="24"/><text:span text:style-name="T14">每層工作量都是 n <text:s/>！</text:span></text:p>
      <text:p text:style-name="P36"/>
      <text:p text:style-name="P27">樹高：<text:span text:style-name="T26">n→n/2→n/4→...→1</text:span>，<text:span text:style-name="T27">共 log n 層</text:span></text:p>
      <text:p text:style-name="P28"><text:span text:style-name="T41">總工作量 = n × log n </text:span><text:s/>→ <text:s/>O(n log n)</text:p>
      <text:p text:style-name="P8"/>
      <text:p text:style-name="P33">遞迴樹公式：總工作量 = 每層工作量 × 層數</text:p>
      <text:p text:style-name="P10"/>
      <text:p text:style-name="P11"><text:span text:style-name="T9">💡 <text:s/></text:span><text:span text:style-name="T3">為什麼 log n 一直出現？</text:span></text:p>
      <text:list text:continue-numbering="true" text:style-name="WWNum2">
        <text:list-item>
          <text:p text:style-name="P22">只要<text:span text:style-name="T42">每次把問題砍一半，就會出現 </text:span><text:span text:style-name="T14">log n</text:span></text:p>
        </text:list-item>
        <text:list-item>
          <text:p text:style-name="P22"><text:span text:style-name="T17">Binary Search</text:span>：每次<text:span text:style-name="T43">砍半搜尋範圍</text:span> → <text:span text:style-name="T27">O(log n)</text:span></text:p>
        </text:list-item>
        <text:list-item>
          <text:p text:style-name="P22"><text:span text:style-name="T17">Merge Sort</text:span>：一直<text:span text:style-name="T43">切半直到單一元素</text:span> → <text:span text:style-name="T27">樹高 log n</text:span></text:p>
        </text:list-item>
        <text:list-item>
          <text:p text:style-name="P22"><text:span text:style-name="T17">Heap（堆積）</text:span>：<text:span text:style-name="T43">二元樹的高度</text:span> =<text:span text:style-name="T27"> log n</text:span></text:p>
        </text:list-item>
      </text:list>
      <text:p text:style-name="P38"/>
      <text:p text:style-name="P39"><text:span text:style-name="T9">🍉 <text:s/></text:span><text:span text:style-name="T25">Merge Sort 的 log n：像切西瓜</text:span></text:p>
      <text:p text:style-name="P40">不要死背「切半直到單一元素」，要有畫面感：</text:p>
      <text:p text:style-name="P41">有 8 個元素：[8, 3, 1, 7, 0, 10, 2, 5]</text:p>
      <text:p text:style-name="P42"/>
      <text:p text:style-name="P43"><text:soft-page-break/>第一刀：[8,3,1,7] <text:s/>| <text:s/>[0,10,2,5] <text:s text:c="8"/>→ 8個 → 4個</text:p>
      <text:p text:style-name="P43">第二刀：[8,3] [1,7] | [0,10] [2,5] <text:s text:c="7"/>→ 4個 → 2個</text:p>
      <text:p text:style-name="P43">第三刀：[8] [3] [1] [7] [0] [10] [2] [5] <text:s/>→ 2個 → 1個</text:p>
      <text:p text:style-name="P42"/>
      <text:p text:style-name="P43">問：8 個元素切幾次才變 1 個？</text:p>
      <text:p text:style-name="P43"><text:s text:c="2"/>8 → 4 → 2 → 1 <text:s text:c="2"/>共 3 次</text:p>
      <text:p text:style-name="P43"><text:s text:c="2"/>log₂(8) = 3 <text:s/>✓</text:p>
      <text:p text:style-name="P42"/>
      <text:p text:style-name="P44">→ 遞迴樹有幾層 = log n</text:p>
      <text:p text:style-name="P45"/>
      <text:p text:style-name="P46">Merge Sort 記憶法：像切西瓜，一直切半，樹高 = 切幾次 = log n</text:p>
      <text:p text:style-name="P47"/>
      <text:p text:style-name="P48"><text:span text:style-name="T9">🔀 <text:s/></text:span><text:span text:style-name="T20">但 Merge Sort 還要合併！為什麼是 O(n log n) 不是 O(log n)？</text:span></text:p>
      <text:p text:style-name="P49">這是學習 Merge Sort 最關鍵的一步——切半只決定「有幾層」，合併才決定「每層花多少工作」。</text:p>
      <text:p text:style-name="P50"/>
      <text:p text:style-name="P48"><text:span text:style-name="T9">第①部分 <text:s/></text:span><text:span text:style-name="T3">分拆（Divide）：產生 log n 層</text:span></text:p>
      <text:p text:style-name="P51">原始：[8, 3, 1, 7, 0, 10, 2, 5] <text:s text:c="2"/>→ 8 個元素</text:p>
      <text:p text:style-name="P52"/>
      <text:p text:style-name="P53">第1刀：[8,3,1,7] <text:s text:c="5"/>[0,10,2,5] <text:s/>→ 各 4 個</text:p>
      <text:p text:style-name="P53">第2刀：[8,3] [1,7] <text:s text:c="3"/>[0,10] [2,5] → 各 2 個</text:p>
      <text:p text:style-name="P53">第3刀：[8][3][1][7] <text:s text:c="2"/>[0][10][2][5] → 各 1 個，停！</text:p>
      <text:p text:style-name="P52"/>
      <text:p text:style-name="P54">共切了 3 刀 = log₂8 = 3 <text:s/>→ <text:s/>樹高 = log n</text:p>
      <text:p text:style-name="P55"/>
      <text:p text:style-name="P48"><text:span text:style-name="T9">第②部分 <text:s/></text:span><text:span text:style-name="T30">合併（Merge）：每層都掃過全部 n 個元素</text:span></text:p>
      <text:p text:style-name="P56">切完後，從底層一路「排序合併」回頂層：</text:p>
      <text:p text:style-name="P57"/>
      <text:p text:style-name="P51">─── 第1層 merge（4組，各合2個）──────────────────</text:p>
      <text:p text:style-name="P53">[8]+[3] → 比 8 vs 3，3小 <text:s/>→ [3, 8]</text:p>
      <text:p text:style-name="P53">[1]+[7] → 比 1 vs 7，1小 <text:s/>→ [1, 7]</text:p>
      <text:p text:style-name="P53">[0]+[10]→ 比 0 vs 10，0小 → [0, 10]</text:p>
      <text:p text:style-name="P53">[2]+[5] → 比 2 vs 5，2小 <text:s/>→ [2, 5]</text:p>
      <text:p text:style-name="P53">本層共處理：8 個元素 <text:s/>→ 成本 = n</text:p>
      <text:p text:style-name="P52"/>
      <text:p text:style-name="P53">─── 第2層 merge（2組，各合4個）──────────────────</text:p>
      <text:p text:style-name="P53">[3,8]+[1,7]：</text:p>
      <text:p text:style-name="P53"><text:s text:c="2"/>比 3 vs 1 → 1 <text:s/>比 3 vs 7 → 3 <text:s/>比 8 vs 7 → 7 <text:s/>剩 8</text:p>
      <text:p text:style-name="P53"><text:s text:c="2"/>→ [1, 3, 7, 8]</text:p>
      <text:p text:style-name="P53">[0,10]+[2,5]：</text:p>
      <text:p text:style-name="P53"><text:s text:c="2"/>比 0 vs 2 → 0 <text:s/>比 10 vs 2 → 2 <text:s/>比 10 vs 5 → 5 <text:s/>剩 10</text:p>
      <text:p text:style-name="P53"><text:s text:c="2"/>→ [0, 2, 5, 10]</text:p>
      <text:p text:style-name="P53">本層共處理：8 個元素 <text:s/>→ 成本 = n</text:p>
      <text:p text:style-name="P52"/>
      <text:p text:style-name="P53">─── 第3層 merge（最後大合併）─────────────────────</text:p>
      <text:p text:style-name="P53">[1,3,7,8]+[0,2,5,10]：</text:p>
      <text:p text:style-name="P53"><text:s text:c="2"/>1vs0→0 <text:s/>1vs2→1 <text:s/>3vs2→2 <text:s/>3vs5→3 <text:s/>7vs5→5 <text:s/>7vs10→7 <text:s/>8vs10→8 <text:s/>剩10</text:p>
      <text:p text:style-name="P53"><text:s text:c="2"/>→ [0, 1, 2, 3, 5, 7, 8, 10] <text:s/>✓ 排序完成！</text:p>
      <text:p text:style-name="P54">本層共處理：8 個元素 <text:s/>→ 成本 = n</text:p>
      <text:p text:style-name="P55"/>
      <text:p text:style-name="P58"><text:span text:style-name="T44">⭐ </text:span><text:span text:style-name="T45">超重要發現：</text:span><text:span text:style-name="T46">不管是第幾層的 merge</text:span><text:span text:style-name="T47">，</text:span><text:span text:style-name="T48">每層都會把全部 n 個元素掃過一次！</text:span><text:span text:style-name="T47">所以</text:span><text:span text:style-name="T49">每層成本永遠是 O(n)</text:span><text:span text:style-name="T47">。</text:span></text:p>
      <text:p text:style-name="P55"/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ext:soft-page-break/>
          <table:table-row table:style-name="表格11.1">
            <table:table-cell table:style-name="表格11.A1" office:value-type="string">
              <text:p text:style-name="P59">merge 層次</text:p>
            </table:table-cell>
            <table:table-cell table:style-name="表格11.A1" office:value-type="string">
              <text:p text:style-name="P59">內容</text:p>
            </table:table-cell>
            <table:table-cell table:style-name="表格11.A1" office:value-type="string">
              <text:p text:style-name="P59">處理元素數</text:p>
            </table:table-cell>
            <table:table-cell table:style-name="表格11.A1" office:value-type="string">
              <text:p text:style-name="P59">成本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60">第1層</text:p>
          </table:table-cell>
          <table:table-cell table:style-name="表格11.B2" office:value-type="string">
            <text:p text:style-name="P61">[8]+[3], [1]+[7], [0]+[10], [2]+[5]</text:p>
          </table:table-cell>
          <table:table-cell table:style-name="表格11.C2" office:value-type="string">
            <text:p text:style-name="P62">4組×2 = 8 個</text:p>
          </table:table-cell>
          <table:table-cell table:style-name="表格11.A2" office:value-type="string">
            <text:p text:style-name="P63">O(n)</text:p>
          </table:table-cell>
        </table:table-row>
        <table:table-row table:style-name="表格11.1">
          <table:table-cell table:style-name="表格11.A2" office:value-type="string">
            <text:p text:style-name="P60">第2層</text:p>
          </table:table-cell>
          <table:table-cell table:style-name="表格11.B2" office:value-type="string">
            <text:p text:style-name="P61">[3,8]+[1,7], [0,10]+[2,5]</text:p>
          </table:table-cell>
          <table:table-cell table:style-name="表格11.C2" office:value-type="string">
            <text:p text:style-name="P62">2組×4 = 8 個</text:p>
          </table:table-cell>
          <table:table-cell table:style-name="表格11.A2" office:value-type="string">
            <text:p text:style-name="P63">O(n)</text:p>
          </table:table-cell>
        </table:table-row>
        <table:table-row table:style-name="表格11.1">
          <table:table-cell table:style-name="表格11.A2" office:value-type="string">
            <text:p text:style-name="P60">第3層</text:p>
          </table:table-cell>
          <table:table-cell table:style-name="表格11.B2" office:value-type="string">
            <text:p text:style-name="P61">[1,3,7,8]+[0,2,5,10]</text:p>
          </table:table-cell>
          <table:table-cell table:style-name="表格11.C2" office:value-type="string">
            <text:p text:style-name="P62">1組×8 = 8 個</text:p>
          </table:table-cell>
          <table:table-cell table:style-name="表格11.A2" office:value-type="string">
            <text:p text:style-name="P63">O(n)</text:p>
          </table:table-cell>
        </table:table-row>
        <table:table-row table:style-name="表格11.1">
          <table:table-cell table:style-name="表格11.A5" table:number-columns-spanned="3" office:value-type="string">
            <text:p text:style-name="P64">總計：<text:span text:style-name="T50">log n 層 × 每層 O(n)</text:span></text:p>
          </table:table-cell>
          <table:covered-table-cell/>
          <table:covered-table-cell/>
          <table:table-cell table:style-name="表格11.A5" office:value-type="string">
            <text:p text:style-name="P65">O(n log n)</text:p>
          </table:table-cell>
        </table:table-row>
      </table:table>
      <text:p text:style-name="P55"/>
      <text:p text:style-name="P48"><text:span text:style-name="T9">🎯 <text:s/></text:span><text:span text:style-name="T12">為什麼這對考試很重要？</text:span></text:p>
      <text:p text:style-name="P49"><text:span text:style-name="T51">Divide and Conquer 題目幾乎都長這樣</text:span>：<text:span text:style-name="T14">T(n) = 2T(n/2) + n</text:span></text:p>
      <text:p text:style-name="P51">T(n) = 2T(n/2) + n</text:p>
      <text:p text:style-name="P53"><text:s text:c="8"/>↑ <text:s text:c="10"/>↑</text:p>
      <text:p text:style-name="P53"><text:s text:c="3"/><text:span text:style-name="T26">兩個子問題</text:span> <text:s text:c="3"/><text:span text:style-name="T15">這層合併花 n</text:span></text:p>
      <text:p text:style-name="P53"><text:s text:c="3"/>各大小 <text:span text:style-name="T42">n/2</text:span></text:p>
      <text:p text:style-name="P52"/>
      <text:p text:style-name="P53">→ <text:span text:style-name="T52">樹高 </text:span><text:span text:style-name="T53">log n（</text:span><text:span text:style-name="T54">一直砍半</text:span><text:span text:style-name="T53">）</text:span></text:p>
      <text:p text:style-name="P53">→ <text:span text:style-name="T55">每層成本 </text:span><text:span text:style-name="T53">n（</text:span><text:span text:style-name="T54">每層合併</text:span><text:span text:style-name="T53">）</text:span></text:p>
      <text:p text:style-name="P54">→ 總計 <text:span text:style-name="T27">O(n log n)</text:span></text:p>
      <text:p text:style-name="P66"><text:span text:style-name="T56">最終口訣：</text:span><text:span text:style-name="T57">分拆決定「有幾層」= log n</text:span><text:span text:style-name="T56">；</text:span><text:span text:style-name="T57">合併決定「每層幾工作」= n</text:span><text:span text:style-name="T56">；相乘 = O(n log n)</text:span></text:p>
      <text:p text:style-name="P47"/>
      <text:p text:style-name="P39"><text:span text:style-name="T9">🌳 <text:s/></text:span><text:span text:style-name="T12">Heap 的 log n：每層容量翻倍</text:span></text:p>
      <text:p text:style-name="P40">先不看 Heap，先看「完全二元樹」的形狀：</text:p>
      <text:p text:style-name="P41">層數 0： <text:s text:c="9"/>● <text:s text:c="13"/>→ 1 個節點</text:p>
      <text:p text:style-name="P43">層數 1： <text:s text:c="7"/>● <text:s text:c="2"/>● <text:s text:c="11"/>→ 2 個節點</text:p>
      <text:p text:style-name="P43">層數 2： <text:s text:c="5"/>● <text:s/>● ● ● <text:s text:c="10"/>→ 4 個節點</text:p>
      <text:p text:style-name="P43">層數 3： <text:s text:c="3"/>● ● ●● ●● ●● <text:s text:c="8"/>→ 8 個節點</text:p>
      <text:p text:style-name="P42"/>
      <text:p text:style-name="P43">規律：<text:span text:style-name="T58">高度每 +1，節點數 ×2</text:span></text:p>
      <text:p text:style-name="P43">反過來：<text:span text:style-name="T27">節點數 ×2 → 高度只 +1</text:span>（<text:span text:style-name="T59">這就是 log 的來源！</text:span>）</text:p>
      <text:p text:style-name="P42"/>
      <text:p text:style-name="P43">例：節點數從 8 增加到 16（×2）→ 高度從 3 增加到 4（+1）</text:p>
      <text:p text:style-name="P44"><text:s text:c="3"/>節點數從 8 增加到 64（×8）→ 高度從 3 增加到 6（+3 = log₂8）</text:p>
      <text:p text:style-name="P45"/>
      <text:p text:style-name="P67">Heap 插入新元素時：</text:p>
      <text:list text:continue-numbering="true" text:style-name="WWNum2">
        <text:list-item>
          <text:p text:style-name="P68"><text:span text:style-name="T10">新節點加在最底層</text:span>，<text:span text:style-name="T60">一路往上與父節點比較並交換</text:span></text:p>
        </text:list-item>
        <text:list-item>
          <text:p text:style-name="P69">最多走幾步？= 樹高 = log n</text:p>
        </text:list-item>
        <text:list-item>
          <text:p text:style-name="P68">所以 Heap 的插入/刪除都是 O(log n)</text:p>
        </text:list-item>
      </text:list>
      <text:p text:style-name="P45"/>
      <text:p text:style-name="P70">Heap 記憶法：每層容量翻倍，所以樹很矮，高度 = log n</text:p>
      <text:p text:style-name="P47"/>
      <text:p text:style-name="P39"><text:span text:style-name="T9">📌 <text:s/></text:span><text:span text:style-name="T3">超考試口訣表</text:span>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header-rows>
          <table:table-row table:style-name="表格10.1">
            <table:table-cell table:style-name="表格10.A1" office:value-type="string">
              <text:p text:style-name="P71">類型</text:p>
            </table:table-cell>
            <table:table-cell table:style-name="表格10.A1" office:value-type="string">
              <text:p text:style-name="P71">圖像記憶</text:p>
            </table:table-cell>
            <table:table-cell table:style-name="表格10.A1" office:value-type="string">
              <text:p text:style-name="P71">複雜度結果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72">Binary Search</text:p>
          </table:table-cell>
          <table:table-cell table:style-name="表格10.B2" office:value-type="string">
            <text:p text:style-name="P73">搜尋範圍每次砍半</text:p>
          </table:table-cell>
          <table:table-cell table:style-name="表格10.A2" office:value-type="string">
            <text:p text:style-name="P74">O(<text:span text:style-name="T10">log n</text:span>)</text:p>
          </table:table-cell>
        </table:table-row>
        <table:table-row table:style-name="表格10.1">
          <table:table-cell table:style-name="表格10.A3" office:value-type="string">
            <text:p text:style-name="P75">Merge Sort</text:p>
          </table:table-cell>
          <table:table-cell table:style-name="表格10.B2" office:value-type="string">
            <text:p text:style-name="P73">一直切半，像切西瓜</text:p>
          </table:table-cell>
          <table:table-cell table:style-name="表格10.A3" office:value-type="string">
            <text:p text:style-name="P76">樹高 = <text:span text:style-name="T10">log n</text:span> 層</text:p>
          </table:table-cell>
        </table:table-row>
        <table:table-row table:style-name="表格10.1">
          <table:table-cell table:style-name="表格10.A4" office:value-type="string">
            <text:p text:style-name="P77">Heap</text:p>
          </table:table-cell>
          <table:table-cell table:style-name="表格10.B2" office:value-type="string">
            <text:p text:style-name="P73">每層節點數翻倍，樹很矮</text:p>
          </table:table-cell>
          <table:table-cell table:style-name="表格10.A4" office:value-type="string">
            <text:p text:style-name="P78">高度 = <text:span text:style-name="T10">log n</text:span></text:p>
          </table:table-cell>
        </table:table-row>
      </table:table>
      <text:p text:style-name="P79"><text:soft-page-break/></text:p>
      <text:p text:style-name="P7"><text:span text:style-name="T1">第七章 <text:s/></text:span><text:span text:style-name="T2">Merge Sort 深度解析</text:span></text:p>
      <text:p text:style-name="P8"/>
      <text:p text:style-name="P25">Merge Sort 最大優點：不論輸入是什麼順序，<text:span text:style-name="T61">永遠是 O(n log n)</text:span>，絕不退化。</text:p>
      <text:p text:style-name="P10"/>
      <text:p text:style-name="P11"><text:span text:style-name="T9">🔄 <text:s/></text:span><text:span text:style-name="T3">為什麼</text:span><text:span text:style-name="T62">每層工作量永遠是 n</text:span><text:span text:style-name="T3">？</text:span></text:p>
      <text:p text:style-name="P26">第1層：把 2 段 n/2 的陣列合成 1 段 n <text:s text:c="2"/>→ 比較 n 次</text:p>
      <text:p text:style-name="P27">第2層：把 4 段 n/4 的陣列合成 2 段 n/2 <text:s/>→ 比較 n/4×<text:span text:style-name="T26">4</text:span>=n 次</text:p>
      <text:p text:style-name="P27">第3層：把 8 段 n/8 的陣列合成 4 段 n/4 <text:s/>→ 比較 n/8×<text:span text:style-name="T26">8</text:span>=n 次</text:p>
      <text:p text:style-name="P28">每層永遠 n 次！ <text:s/>× <text:s/>log n 層 <text:s/>= <text:s/>O(n log n)</text:p>
      <text:p text:style-name="P8"/>
      <text:p text:style-name="P33">Merge Sort 秘密：不論輸入如何，每層均勻分佈，永遠 O(n log n)，不退化！</text:p>
      <text:p text:style-name="P24"/>
      <text:p text:style-name="P7"><text:span text:style-name="T1">第八章 <text:s/></text:span><text:span text:style-name="T2">Quick Sort 深度解析</text:span></text:p>
      <text:p text:style-name="P8"/>
      <text:p text:style-name="P25">Quick Sort<text:span text:style-name="T26"> 效率</text:span><text:span text:style-name="T28">取決於</text:span><text:span text:style-name="T27"> pivot 的選取</text:span>。<text:span text:style-name="T63">切得平均就快，切得爛就退化</text:span>。</text:p>
      <text:p text:style-name="P10"/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80">✅ 平均情況</text:p>
            <text:p text:style-name="P81"/>
            <text:p text:style-name="P82">pivot 恰好切一半</text:p>
            <text:p text:style-name="P83">左右各 n/2</text:p>
            <text:p text:style-name="P83">遞迴樹高 = log n</text:p>
            <text:p text:style-name="P83">每層工作量 = n</text:p>
            <text:p text:style-name="P81"/>
            <text:p text:style-name="P84">→ O(n log n)</text:p>
          </table:table-cell>
          <table:table-cell table:style-name="表格3.B1" office:value-type="string">
            <text:p text:style-name="P85">❌ 最壞情況</text:p>
            <text:p text:style-name="P81"/>
            <text:p text:style-name="P83"><text:span text:style-name="T15">已排序</text:span>，<text:span text:style-name="T15">pivot 選第一個</text:span></text:p>
            <text:p text:style-name="P83">切成 [] | [其餘全部]</text:p>
            <text:p text:style-name="P83">遞迴樹高 = n（非 log n）</text:p>
            <text:p text:style-name="P83">等差累加：n+(n-1)+...+1</text:p>
            <text:p text:style-name="P81"/>
            <text:p text:style-name="P86">→ O(n²)</text:p>
          </table:table-cell>
        </table:table-row>
      </table:table>
      <text:p text:style-name="P34"/>
      <text:p text:style-name="P11"><text:span text:style-name="T9">🎯 <text:s/></text:span><text:span text:style-name="T3">最壞情況完整展開</text:span></text:p>
      <text:p text:style-name="P26">資料 [1,2,3,4,5]，每次選第一個當 pivot：</text:p>
      <text:p text:style-name="P27">第1次：pivot=1，切成 []|[2,3,4,5] <text:s/>→ 做 n 工作</text:p>
      <text:p text:style-name="P27">第2次：pivot=2，切成 []|[3,4,5] <text:s text:c="3"/>→ 做 n-1 工作</text:p>
      <text:p text:style-name="P27">第3次：pivot=3，切成 []|[4,5] <text:s text:c="5"/>→ 做 n-2 工作</text:p>
      <text:p text:style-name="P27">...</text:p>
      <text:p text:style-name="P28">T(n) = n+(n-1)+...+1 = n(n+1)/2 <text:s/>→ <text:s/>O(n²)</text:p>
      <text:p text:style-name="P8"/>
      <text:p text:style-name="P87">退化本質：<text:span text:style-name="T10">遞迴樹高從 log n 層變成 n 層</text:span>，等差累加得 O(n²)</text:p>
      <text:p text:style-name="P24"/>
      <text:p text:style-name="P88"/>
      <text:p text:style-name="P88"/>
      <text:p text:style-name="P88"/>
      <text:p text:style-name="P89"><text:soft-page-break/><text:span text:style-name="T9">🔍 <text:s/></text:span><text:span text:style-name="T30">Quick Sort 最壞情況完整解析（逐步圖解）</text:span></text:p>
      <text:p text:style-name="P90">光記「已排序最壞」還不夠，要真正理解「為什麼會爛」，才能考場靈活應用。</text:p>
      <text:p text:style-name="P91"/>
      <text:p text:style-name="P89"><text:span text:style-name="T9">✅ <text:s/></text:span><text:span text:style-name="T39">好情況</text:span><text:span text:style-name="T25">：</text:span><text:span text:style-name="T64">每次切半</text:span></text:p>
      <text:p text:style-name="P90"><text:span text:style-name="T21">pivot 每次都恰好落在中間</text:span>，左右各得 n/2：</text:p>
      <text:p text:style-name="P92"><text:s text:c="9"/>n <text:s text:c="11"/>← 第1層</text:p>
      <text:p text:style-name="P93"><text:s text:c="6"/>/ <text:s text:c="4"/>\</text:p>
      <text:p text:style-name="P93"><text:s text:c="4"/>n/2 <text:s text:c="4"/>n/2 <text:s text:c="6"/>← 第2層</text:p>
      <text:p text:style-name="P93"><text:s text:c="3"/>/ <text:s/>\ <text:s text:c="2"/>/ <text:s/>\</text:p>
      <text:p text:style-name="P93"><text:s/>n/4 n/4 n/4 n/4 <text:s text:c="5"/>← 第3層</text:p>
      <text:p text:style-name="P94"/>
      <text:p text:style-name="P93">→ 樹高 = log n（<text:span text:style-name="T65">每次砍半</text:span>）</text:p>
      <text:p text:style-name="P93">→ 每層工作 = n</text:p>
      <text:p text:style-name="P95">→ 總計 O(n log n)</text:p>
      <text:p text:style-name="P96"/>
      <text:p text:style-name="P89"><text:span text:style-name="T9">❌ <text:s/></text:span><text:span text:style-name="T66">最壞情況</text:span><text:span text:style-name="T30">：</text:span><text:span text:style-name="T67">已排序資料</text:span><text:span text:style-name="T30"> + </text:span><text:span text:style-name="T68">選第一個當 pivot</text:span></text:p>
      <text:p text:style-name="P90">以 [1, 2, 3, 4, 5] 為例，<text:span text:style-name="T26">每次都選第一個當 pivot</text:span>：</text:p>
      <text:p text:style-name="P97"/>
      <text:p text:style-name="P92">第1次：pivot=1 <text:s/>→ 左:[] <text:s/>右:[2,3,4,5] <text:s text:c="2"/>掃 5 個</text:p>
      <text:p text:style-name="P93">第2次：pivot=2 <text:s/>→ 左:[] <text:s/>右:[3,4,5] <text:s text:c="4"/>掃 4 個</text:p>
      <text:p text:style-name="P93">第3次：pivot=3 <text:s/>→ 左:[] <text:s/>右:[4,5] <text:s text:c="6"/>掃 3 個</text:p>
      <text:p text:style-name="P93">第4次：pivot=4 <text:s/>→ 左:[] <text:s/>右:[5] <text:s text:c="8"/>掃 2 個</text:p>
      <text:p text:style-name="P93">第5次：剩 [5] <text:s/>→ 結束 <text:s text:c="18"/>掃 1 個</text:p>
      <text:p text:style-name="P94"/>
      <text:p text:style-name="P95"><text:span text:style-name="T69">每次只少 1 個元素！</text:span><text:span text:style-name="T70">根本沒有「切半」這件事。</text:span></text:p>
      <text:p text:style-name="P91"/>
      <text:p text:style-name="P98">遞迴樹的形狀完全不同：</text:p>
      <table:table table:name="表格12" table:style-name="表格12">
        <table:table-column table:style-name="表格12.A" table:number-columns-repeated="2"/>
        <table:table-row table:style-name="表格12.1">
          <table:table-cell table:style-name="表格12.A1" office:value-type="string">
            <text:p text:style-name="P99">✅ <text:span text:style-name="T10">好情況（平衡）</text:span></text:p>
            <text:p text:style-name="P97"/>
            <text:p text:style-name="P100"><text:s text:c="9"/>n <text:s text:c="8"/></text:p>
            <text:p text:style-name="P100"><text:s text:c="6"/>/ <text:s text:c="6"/>\</text:p>
            <text:p text:style-name="P100"><text:s text:c="4"/>n/2 <text:s text:c="4"/>n/2 <text:s/></text:p>
            <text:p text:style-name="P100"><text:s text:c="3"/>/ <text:s text:c="2"/>\ <text:s text:c="2"/>/ <text:s text:c="2"/>\</text:p>
            <text:p text:style-name="P100">n/4 n/4 n/4 n/4 <text:s/></text:p>
            <text:p text:style-name="P101"/>
            <text:p text:style-name="P100"><text:span text:style-name="T26">樹高 = log n </text:span><text:s text:c="2"/></text:p>
            <text:p text:style-name="P100">→ 像二元樹，很矮</text:p>
            <text:p text:style-name="P97"/>
            <text:p text:style-name="P102">O(<text:span text:style-name="T10">n log n</text:span>)</text:p>
          </table:table-cell>
          <table:table-cell table:style-name="表格12.B1" office:value-type="string">
            <text:p text:style-name="P103">❌ <text:span text:style-name="T60">壞情況（退化）</text:span></text:p>
            <text:p text:style-name="P97"/>
            <text:p text:style-name="P104">n</text:p>
            <text:p text:style-name="P104"><text:s text:c="2"/>╲</text:p>
            <text:p text:style-name="P104"><text:s text:c="2"/>n-1</text:p>
            <text:p text:style-name="P104"><text:s text:c="5"/>╲</text:p>
            <text:p text:style-name="P104"><text:s text:c="5"/>n-2</text:p>
            <text:p text:style-name="P104"><text:s text:c="8"/>╲</text:p>
            <text:p text:style-name="P104"><text:s text:c="8"/>...</text:p>
            <text:p text:style-name="P104"><text:s text:c="11"/>1</text:p>
            <text:p text:style-name="P101"/>
            <text:p text:style-name="P105">樹高 = n</text:p>
            <text:p text:style-name="P104">→ 像鏈結串列，超高</text:p>
            <text:p text:style-name="P97"/>
            <text:p text:style-name="P106">O(<text:span text:style-name="T60">n²</text:span>)</text:p>
          </table:table-cell>
        </table:table-row>
      </table:table>
      <text:p text:style-name="P96"/>
      <text:p text:style-name="P89"><text:span text:style-name="T9">📐 <text:s/></text:span><text:span text:style-name="T20">總工作量計算：等差累加</text:span></text:p>
      <text:p text:style-name="P92">第1層掃 n 個，第2層掃 n-1 個，第3層掃 n-2 個 ...</text:p>
      <text:p text:style-name="P94"/>
      <text:p text:style-name="P93">總工作量 = n + (n-1) + (n-2) + ... + 2 + 1</text:p>
      <text:p text:style-name="P93"><text:s text:c="9"/>= n(n+1)/2</text:p>
      <text:p text:style-name="P95"><text:s text:c="9"/>= O(n²)</text:p>
      <text:p text:style-name="P96"><text:soft-page-break/></text:p>
      <text:p text:style-name="P89"><text:span text:style-name="T9">🛡️ <text:s/></text:span><text:span text:style-name="T71">如何避免最壞情況？</text:span></text:p>
      <text:list text:continue-numbering="true" text:style-name="WWNum2">
        <text:list-item>
          <text:p text:style-name="P107">Random pivot（隨機選 pivot）：讓「<text:span text:style-name="T10">選到爛 pivot 的機率</text:span>」<text:span text:style-name="T60">趨近於零</text:span></text:p>
        </text:list-item>
        <text:list-item>
          <text:p text:style-name="P107">Median-of-three（三數取中）：<text:span text:style-name="T27">取首、中、尾三者的中位數當 pivot</text:span>，避免已排序資料退化</text:p>
        </text:list-item>
      </text:list>
      <text:p text:style-name="P91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header-rows>
          <table:table-row table:style-name="表格13.1">
            <table:table-cell table:style-name="表格13.A1" office:value-type="string">
              <text:p text:style-name="P108">情況</text:p>
            </table:table-cell>
            <table:table-cell table:style-name="表格13.A1" office:value-type="string">
              <text:p text:style-name="P108">樹高</text:p>
            </table:table-cell>
            <table:table-cell table:style-name="表格13.A1" office:value-type="string">
              <text:p text:style-name="P108">複雜度</text:p>
            </table:table-cell>
            <table:table-cell table:style-name="表格13.A1" office:value-type="string">
              <text:p text:style-name="P108">原因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109">平均<text:span text:style-name="T10">切半</text:span></text:p>
          </table:table-cell>
          <table:table-cell table:style-name="表格13.A2" office:value-type="string">
            <text:p text:style-name="P110">log n</text:p>
          </table:table-cell>
          <table:table-cell table:style-name="表格13.A2" office:value-type="string">
            <text:p text:style-name="P110">O(n log n)</text:p>
          </table:table-cell>
          <table:table-cell table:style-name="表格13.D2" office:value-type="string">
            <text:p text:style-name="P111">每次切成 n/2 + n/2</text:p>
          </table:table-cell>
        </table:table-row>
        <table:table-row table:style-name="表格13.1">
          <table:table-cell table:style-name="表格13.A3" office:value-type="string">
            <text:p text:style-name="P112">每次只少 1 個</text:p>
          </table:table-cell>
          <table:table-cell table:style-name="表格13.A3" office:value-type="string">
            <text:p text:style-name="P113">n</text:p>
          </table:table-cell>
          <table:table-cell table:style-name="表格13.A3" office:value-type="string">
            <text:p text:style-name="P113">O(n²)</text:p>
          </table:table-cell>
          <table:table-cell table:style-name="表格13.D3" office:value-type="string">
            <text:p text:style-name="P111">切成 0 + (n-1)，<text:span text:style-name="T61">沒有 divide</text:span></text:p>
          </table:table-cell>
        </table:table-row>
      </table:table>
      <text:p text:style-name="P91"/>
      <text:p text:style-name="P87">Quick Sort 最壞情況本質：Divide and Conquer 失敗——<text:span text:style-name="T10">沒有真正「divide」成功</text:span>，<text:span text:style-name="T60">退化成等差累加</text:span>。</text:p>
      <text:p text:style-name="P114"/>
      <text:p text:style-name="P7"><text:span text:style-name="T1">第九章 <text:s/></text:span><text:span text:style-name="T2">Binary Search 完整分析</text:span></text:p>
      <text:p text:style-name="P8"/>
      <text:p text:style-name="P25">Binary Search（二元搜尋）：每次把搜尋範圍砍成一半，直到找到或確定不存在。</text:p>
      <text:p text:style-name="P10"/>
      <table:table table:name="表格4" table:style-name="表格4">
        <table:table-column table:style-name="表格4.A"/>
        <table:table-column table:style-name="表格4.B"/>
        <table:table-column table:style-name="表格4.A"/>
        <table:table-column table:style-name="表格4.D"/>
        <table:table-header-rows>
          <table:table-row table:style-name="表格4.1">
            <table:table-cell table:style-name="表格4.A1" office:value-type="string">
              <text:p text:style-name="P12">情況</text:p>
            </table:table-cell>
            <table:table-cell table:style-name="表格4.A1" office:value-type="string">
              <text:p text:style-name="P12">複雜度</text:p>
            </table:table-cell>
            <table:table-cell table:style-name="表格4.A1" office:value-type="string">
              <text:p text:style-name="P12">遞迴式</text:p>
            </table:table-cell>
            <table:table-cell table:style-name="表格4.A1" office:value-type="string">
              <text:p text:style-name="P12">說明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15">最佳（Best）</text:p>
          </table:table-cell>
          <table:table-cell table:style-name="表格4.A2" office:value-type="string">
            <text:p text:style-name="P116">O(1)</text:p>
          </table:table-cell>
          <table:table-cell table:style-name="表格4.C2" office:value-type="string">
            <text:p text:style-name="P117">T(1)=1</text:p>
          </table:table-cell>
          <table:table-cell table:style-name="表格4.D2" office:value-type="string">
            <text:p text:style-name="P14"><text:span text:style-name="T10">第一次比較就找到</text:span>（<text:span text:style-name="T61">目標在正中間</text:span>）</text:p>
          </table:table-cell>
        </table:table-row>
        <table:table-row table:style-name="表格4.1">
          <table:table-cell table:style-name="表格4.A3" office:value-type="string">
            <text:p text:style-name="P118">平均（Average）</text:p>
          </table:table-cell>
          <table:table-cell table:style-name="表格4.A3" office:value-type="string">
            <text:p text:style-name="P16">O(log n)</text:p>
          </table:table-cell>
          <table:table-cell table:style-name="表格4.C3" office:value-type="string">
            <text:p text:style-name="P35">T(n)=T(n/2)+1</text:p>
          </table:table-cell>
          <table:table-cell table:style-name="表格4.C2" office:value-type="string">
            <text:p text:style-name="P14">每次<text:span text:style-name="T10">砍半</text:span>，平均需 <text:span text:style-name="T72">log n</text:span> 次</text:p>
          </table:table-cell>
        </table:table-row>
        <table:table-row table:style-name="表格4.1">
          <table:table-cell table:style-name="表格4.A4" office:value-type="string">
            <text:p text:style-name="P119">最壞（Worst）</text:p>
          </table:table-cell>
          <table:table-cell table:style-name="表格4.A4" office:value-type="string">
            <text:p text:style-name="P19">O(log n)</text:p>
          </table:table-cell>
          <table:table-cell table:style-name="表格4.C3" office:value-type="string">
            <text:p text:style-name="P35">T(n)=T(n/2)+1</text:p>
          </table:table-cell>
          <table:table-cell table:style-name="表格4.D2" office:value-type="string">
            <text:p text:style-name="P14">目標不存在，<text:span text:style-name="T14">砍到只剩 1 個才確認</text:span></text:p>
          </table:table-cell>
        </table:table-row>
      </table:table>
      <text:p text:style-name="P10"/>
      <text:p text:style-name="P11"><text:span text:style-name="T9">📏 <text:s/></text:span><text:span text:style-name="T3">數學推導：為什麼是 log n？</text:span></text:p>
      <text:p text:style-name="P26">每次砍半：n → n/2 → n/4 → ... → 1</text:p>
      <text:p text:style-name="P27">設砍了 k 次後剩 1：n / 2^k = 1</text:p>
      <text:p text:style-name="P27">→ 2^k = n → k = log₂n</text:p>
      <text:p text:style-name="P27">→ 共砍 log₂n 次，每次 1 個工作 <text:s/>→ <text:s/>O(log n)</text:p>
      <text:p text:style-name="P36"/>
      <text:p text:style-name="P28">直觀：100萬筆資料 → log₂(1,000,000) ≈ 20 次就找到！</text:p>
      <text:p text:style-name="P24"/>
      <text:p text:style-name="P120"><text:span text:style-name="T9">🔒 <text:s/></text:span><text:span text:style-name="T25">Binary Search 為什麼永遠不會退化？</text:span></text:p>
      <text:p text:style-name="P121">這是很多人的疑問：<text:span text:style-name="T73">Quick Sort 最壞會退化到 O(n²)</text:span>，<text:span text:style-name="T37">Binary Search 為什麼不會？</text:span></text:p>
      <text:p text:style-name="P122"/>
      <text:p text:style-name="P123">關鍵差異：</text:p>
      <text:list text:continue-numbering="true" text:style-name="WWNum2">
        <text:list-item>
          <text:p text:style-name="P124"><text:span text:style-name="T27">Quick Sort：每次切割的位置取決於 pivot</text:span>，<text:span text:style-name="T74">pivot 選歪了</text:span>就<text:span text:style-name="T75">切不平均，導致退化</text:span></text:p>
        </text:list-item>
        <text:list-item>
          <text:p text:style-name="P124"><text:span text:style-name="T14">Binary Search：每次一定取「正中間」元素</text:span>，left/right 各砍一半，<text:span text:style-name="T76">沒有「切歪」這件事</text:span></text:p>
        </text:list-item>
        <text:list-item>
          <text:p text:style-name="P124"><text:span text:style-name="T69">Merge Sort：也是永遠切一半</text:span>，<text:span text:style-name="T77">同樣不會退化</text:span></text:p>
        </text:list-item>
      </text:list>
      <text:p text:style-name="P125"/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 table:style-name="表格14.1">
            <table:table-cell table:style-name="表格14.A1" office:value-type="string">
              <text:p text:style-name="P126">演算法</text:p>
            </table:table-cell>
            <table:table-cell table:style-name="表格14.A1" office:value-type="string">
              <text:p text:style-name="P126">最壞會退化？</text:p>
            </table:table-cell>
            <table:table-cell table:style-name="表格14.A1" office:value-type="string">
              <text:p text:style-name="P126">最壞複雜度</text:p>
            </table:table-cell>
            <table:table-cell table:style-name="表格14.A1" office:value-type="string">
              <text:p text:style-name="P126">原因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127">Binary Search</text:p>
          </table:table-cell>
          <table:table-cell table:style-name="表格14.B2" office:value-type="string">
            <text:p text:style-name="P128">❌ 不會</text:p>
          </table:table-cell>
          <table:table-cell table:style-name="表格14.C2" office:value-type="string">
            <text:p text:style-name="P129">O(log n)</text:p>
          </table:table-cell>
          <table:table-cell table:style-name="表格14.D2" office:value-type="string">
            <text:p text:style-name="P130"><text:span text:style-name="T26">永遠正中間砍半</text:span>，不依賴輸入資料</text:p>
          </table:table-cell>
        </table:table-row>
        <table:table-row table:style-name="表格14.1">
          <table:table-cell table:style-name="表格14.A2" office:value-type="string">
            <text:p text:style-name="P127">Merge Sort</text:p>
          </table:table-cell>
          <table:table-cell table:style-name="表格14.B2" office:value-type="string">
            <text:p text:style-name="P128">❌ 不會</text:p>
          </table:table-cell>
          <table:table-cell table:style-name="表格14.C2" office:value-type="string">
            <text:p text:style-name="P129">O(n log n)</text:p>
          </table:table-cell>
          <table:table-cell table:style-name="表格14.D3" office:value-type="string">
            <text:p text:style-name="P130"><text:span text:style-name="T26">永遠平均切半</text:span>，合併步驟固定做 n 工作</text:p>
          </table:table-cell>
        </table:table-row>
        <table:table-row table:style-name="表格14.1">
          <table:table-cell table:style-name="表格14.A4" office:value-type="string">
            <text:p text:style-name="P131">Quick Sort</text:p>
          </table:table-cell>
          <table:table-cell table:style-name="表格14.B4" office:value-type="string">
            <text:p text:style-name="P132">✅ 會！</text:p>
          </table:table-cell>
          <table:table-cell table:style-name="表格14.B4" office:value-type="string">
            <text:p text:style-name="P133">O(n²)</text:p>
          </table:table-cell>
          <table:table-cell table:style-name="表格14.D2" office:value-type="string">
            <text:p text:style-name="P130"><text:span text:style-name="T27">pivot 可能選歪</text:span>，樹高<text:span text:style-name="T15">從 log n 退化成 n</text:span></text:p>
          </table:table-cell>
        </table:table-row>
      </table:table>
      <text:p text:style-name="P134"/>
      <text:p text:style-name="P120"><text:span text:style-name="T9">🔑 <text:s/></text:span><text:span text:style-name="T12">T(n) = T(n/2) + 1 的「+1」是什麼意思？</text:span></text:p>
      <text:p text:style-name="P121">這個 <text:span text:style-name="T26">+1</text:span><text:span text:style-name="T78"> </text:span>代表「<text:span text:style-name="T79">這一層自己做的工作量</text:span>」，是遞迴式最重要的語意。</text:p>
      <text:p text:style-name="P122"/>
      <text:p text:style-name="P123">Binary Search 每層做什麼？</text:p>
      <text:p text:style-name="P135">mid = (left + right) / 2 <text:s text:c="4"/>// ① <text:span text:style-name="T80">算中間位置</text:span></text:p>
      <text:p text:style-name="P136">if (<text:span text:style-name="T81">arr[mid]</text:span> == target) <text:s text:c="5"/>// ② <text:span text:style-name="T80">比較一次</text:span></text:p>
      <text:p text:style-name="P136"><text:s text:c="4"/>return mid</text:p>
      <text:p text:style-name="P136">else if (<text:span text:style-name="T81">arr[mid]</text:span> &lt; target) <text:s/>// ③ <text:span text:style-name="T80">決定往左或往右</text:span></text:p>
      <text:p text:style-name="P136"><text:s text:c="4"/>left = mid + 1</text:p>
      <text:p text:style-name="P136">else right = mid - 1</text:p>
      <text:p text:style-name="P137"/>
      <text:p text:style-name="P138"><text:span text:style-name="T27">以上三個動作 = 固定工作量 = O(1) </text:span><text:s/>→ <text:s/><text:span text:style-name="T14">遞迴式寫成 +1</text:span></text:p>
      <text:p text:style-name="P125"/>
      <text:p text:style-name="P123">為什麼不是 +n？</text:p>
      <text:list text:continue-numbering="true" text:style-name="WWNum2">
        <text:list-item>
          <text:p text:style-name="P124"><text:span text:style-name="T81">Binary Search：每層只看「正中間那一個元素」</text:span>，<text:span text:style-name="T26">工作量固定 → +1</text:span></text:p>
        </text:list-item>
        <text:list-item>
          <text:p text:style-name="P124"><text:span text:style-name="T27">Merge Sort：每層需要把所有元素逐一比較合併</text:span>，<text:span text:style-name="T15">工作量 = n → +n</text:span></text:p>
        </text:list-item>
      </text:list>
      <text:p text:style-name="P125"/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header-rows>
          <table:table-row table:style-name="表格15.1">
            <table:table-cell table:style-name="表格15.A1" office:value-type="string">
              <text:p text:style-name="P126">演算法</text:p>
            </table:table-cell>
            <table:table-cell table:style-name="表格15.A1" office:value-type="string">
              <text:p text:style-name="P126">遞迴式</text:p>
            </table:table-cell>
            <table:table-cell table:style-name="表格15.A1" office:value-type="string">
              <text:p text:style-name="P126">本層做什麼</text:p>
            </table:table-cell>
            <table:table-cell table:style-name="表格15.A1" office:value-type="string">
              <text:p text:style-name="P126">結果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127">Binary Search</text:p>
          </table:table-cell>
          <table:table-cell table:style-name="表格15.B2" office:value-type="string">
            <text:p text:style-name="P139">T(n)=<text:span text:style-name="T82">T(</text:span><text:span text:style-name="T83">n/2</text:span><text:span text:style-name="T82">)</text:span>+<text:span text:style-name="T26">1</text:span></text:p>
          </table:table-cell>
          <table:table-cell table:style-name="表格15.C2" office:value-type="string">
            <text:p text:style-name="P130"><text:span text:style-name="T10">只看中間 1 個元素</text:span> → 常數</text:p>
          </table:table-cell>
          <table:table-cell table:style-name="表格15.D2" office:value-type="string">
            <text:p text:style-name="P129">O(log n)</text:p>
          </table:table-cell>
        </table:table-row>
        <table:table-row table:style-name="表格15.1">
          <table:table-cell table:style-name="表格15.A2" office:value-type="string">
            <text:p text:style-name="P127">Merge Sort</text:p>
          </table:table-cell>
          <table:table-cell table:style-name="表格15.B2" office:value-type="string">
            <text:p text:style-name="P139">T(n)=<text:span text:style-name="T82">2T(</text:span><text:span text:style-name="T83">n/2</text:span><text:span text:style-name="T82">)</text:span>+<text:span text:style-name="T26">n</text:span></text:p>
          </table:table-cell>
          <table:table-cell table:style-name="表格15.C3" office:value-type="string">
            <text:p text:style-name="P140">合併時掃全部 n 個元素</text:p>
          </table:table-cell>
          <table:table-cell table:style-name="表格15.D3" office:value-type="string">
            <text:p text:style-name="P141">O(n log n)</text:p>
          </table:table-cell>
        </table:table-row>
        <table:table-row table:style-name="表格15.1">
          <table:table-cell table:style-name="表格15.A4" office:value-type="string">
            <text:p text:style-name="P131">Quick Sort 最壞</text:p>
          </table:table-cell>
          <table:table-cell table:style-name="表格15.B2" office:value-type="string">
            <text:p text:style-name="P139">T(n)=<text:span text:style-name="T84">T(</text:span><text:span text:style-name="T32">n-1</text:span><text:span text:style-name="T84">)+n</text:span></text:p>
          </table:table-cell>
          <table:table-cell table:style-name="表格15.C2" office:value-type="string">
            <text:p text:style-name="P130"><text:span text:style-name="T13">每層處理 n 個</text:span> + <text:span text:style-name="T85">完全不切半</text:span></text:p>
          </table:table-cell>
          <table:table-cell table:style-name="表格15.D4" office:value-type="string">
            <text:p text:style-name="P133">O(n²)</text:p>
          </table:table-cell>
        </table:table-row>
      </table:table>
      <text:p text:style-name="P142"/>
      <text:p text:style-name="P120"><text:span text:style-name="T9">📋 <text:s/></text:span><text:span text:style-name="T86">遞迴式語意對照表（一眼看出複雜度）</text:span></text:p>
      <text:p text:style-name="P121">遞迴式的格式是：T(n) = 遞迴子問題 <text:span text:style-name="T27">+ 本層成本</text:span>。看懂本層成本就看懂一半了。</text:p>
      <text:p text:style-name="P122"/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126">遞迴式</text:p>
            </table:table-cell>
            <table:table-cell table:style-name="表格16.A1" office:value-type="string">
              <text:p text:style-name="P126">複雜度</text:p>
            </table:table-cell>
            <table:table-cell table:style-name="表格16.A1" office:value-type="string">
              <text:p text:style-name="P126">本層語意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139">T(n) = T(n/2) + 1</text:p>
          </table:table-cell>
          <table:table-cell table:style-name="表格16.B2" office:value-type="string">
            <text:p text:style-name="P129">O(log n)</text:p>
          </table:table-cell>
          <table:table-cell table:style-name="表格16.C2" office:value-type="string">
            <text:p text:style-name="P143"><text:span text:style-name="T10">每層只做「一次固定比較」</text:span>（Binary Search）</text:p>
          </table:table-cell>
        </table:table-row>
        <table:table-row table:style-name="表格16.1">
          <table:table-cell table:style-name="表格16.A2" office:value-type="string">
            <text:p text:style-name="P139">T(n) = T(n/2) + n</text:p>
          </table:table-cell>
          <table:table-cell table:style-name="表格16.B3" office:value-type="string">
            <text:p text:style-name="P144">O(n)</text:p>
          </table:table-cell>
          <table:table-cell table:style-name="表格16.C3" office:value-type="string">
            <text:p text:style-name="P143"><text:span text:style-name="T10">每層掃全部元素</text:span>，但只有一個子問題</text:p>
          </table:table-cell>
        </table:table-row>
        <table:table-row table:style-name="表格16.1">
          <table:table-cell table:style-name="表格16.A2" office:value-type="string">
            <text:p text:style-name="P139">T(n) = 2T(n/2) + n</text:p>
          </table:table-cell>
          <table:table-cell table:style-name="表格16.B4" office:value-type="string">
            <text:p text:style-name="P141">O(n log n)</text:p>
          </table:table-cell>
          <table:table-cell table:style-name="表格16.C4" office:value-type="string">
            <text:p text:style-name="P143">兩個子問題 + <text:span text:style-name="T10">每層合併掃 n 次</text:span>（Merge Sort）</text:p>
          </table:table-cell>
        </table:table-row>
        <table:table-row table:style-name="表格16.1">
          <table:table-cell table:style-name="表格16.A2" office:value-type="string">
            <text:p text:style-name="P139">T(n) = 2T(n/2) + n²</text:p>
          </table:table-cell>
          <table:table-cell table:style-name="表格16.B5" office:value-type="string">
            <text:p text:style-name="P145">O(n²)</text:p>
          </table:table-cell>
          <table:table-cell table:style-name="表格16.C5" office:value-type="string">
            <text:p text:style-name="P143">f(n)=n² 太大，主導整體（Master Theorem <text:soft-page-break/>Case 3）</text:p>
          </table:table-cell>
        </table:table-row>
        <table:table-row table:style-name="表格16.1">
          <table:table-cell table:style-name="表格16.A2" office:value-type="string">
            <text:p text:style-name="P139">T(n) = T(n-1) + n</text:p>
          </table:table-cell>
          <table:table-cell table:style-name="表格16.B6" office:value-type="string">
            <text:p text:style-name="P133">O(n²)</text:p>
          </table:table-cell>
          <table:table-cell table:style-name="表格16.C6" office:value-type="string">
            <text:p text:style-name="P143"><text:span text:style-name="T10">每次只少 1 個 </text:span>+ <text:span text:style-name="T13">等差累加</text:span>（Quick Sort 最壞）</text:p>
          </table:table-cell>
        </table:table-row>
      </table:table>
      <text:p text:style-name="P125"/>
      <text:p text:style-name="P146">核心觀念：遞迴式 = 遞迴<text:span text:style-name="T10">子問題 </text:span><text:span text:style-name="T87">+ 本層成本</text:span>。<text:span text:style-name="T72">本層成本是 1（常數）→ log n</text:span>；<text:span text:style-name="T11">本層成本是 n（掃全部）→ 多乘一個 n</text:span>。</text:p>
      <text:p text:style-name="P147"/>
      <text:p text:style-name="P24"/>
      <text:p text:style-name="P7"><text:span text:style-name="T1">第十章 <text:s/></text:span><text:span text:style-name="T2">Master Theorem 三大 Case 完整版</text:span></text:p>
      <text:p text:style-name="P8"/>
      <text:p text:style-name="P148">T(n) = a · T(n/b) + f(n)</text:p>
      <text:p text:style-name="P8"/>
      <text:p text:style-name="P149">a <text:s/>= 切成幾份子問題</text:p>
      <text:p text:style-name="P27">b <text:s/>= 每份縮小幾倍</text:p>
      <text:p text:style-name="P150">f(n) = 每層額外花費</text:p>
      <text:p text:style-name="P36"/>
      <text:p text:style-name="P28">三步走：① 算基準值 n^(log_b a) <text:s/>② 比較 f(n) 與基準值 <text:s/>③ 套 Case</text:p>
      <text:p text:style-name="P10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header-rows>
          <table:table-row table:style-name="表格5.1">
            <table:table-cell table:style-name="表格5.A1" office:value-type="string">
              <text:p text:style-name="P12">Case</text:p>
            </table:table-cell>
            <table:table-cell table:style-name="表格5.A1" office:value-type="string">
              <text:p text:style-name="P12">比較結果</text:p>
            </table:table-cell>
            <table:table-cell table:style-name="表格5.A1" office:value-type="string">
              <text:p text:style-name="P12">主角</text:p>
            </table:table-cell>
            <table:table-cell table:style-name="表格5.A1" office:value-type="string">
              <text:p text:style-name="P12">典型例子</text:p>
            </table:table-cell>
            <table:table-cell table:style-name="表格5.A1" office:value-type="string">
              <text:p text:style-name="P12">答案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151">1</text:p>
          </table:table-cell>
          <table:table-cell table:style-name="表格5.B2" office:value-type="string">
            <text:p text:style-name="P15">f(n) 較小</text:p>
          </table:table-cell>
          <table:table-cell table:style-name="表格5.C2" office:value-type="string">
            <text:p text:style-name="P152">遞迴佔主導</text:p>
          </table:table-cell>
          <table:table-cell table:style-name="表格5.D2" office:value-type="string">
            <text:p text:style-name="P35">T(n)=2T(n/2)+1</text:p>
          </table:table-cell>
          <table:table-cell table:style-name="表格5.E2" office:value-type="string">
            <text:p text:style-name="P13">O(n)</text:p>
          </table:table-cell>
        </table:table-row>
        <table:table-row table:style-name="表格5.1">
          <table:table-cell table:style-name="表格5.A3" office:value-type="string">
            <text:p text:style-name="P153">2</text:p>
          </table:table-cell>
          <table:table-cell table:style-name="表格5.B2" office:value-type="string">
            <text:p text:style-name="P15">f(n) 相等</text:p>
          </table:table-cell>
          <table:table-cell table:style-name="表格5.C2" office:value-type="string">
            <text:p text:style-name="P154">勢均力敵</text:p>
          </table:table-cell>
          <table:table-cell table:style-name="表格5.D2" office:value-type="string">
            <text:p text:style-name="P35">T(n)=2T(n/2)+n</text:p>
          </table:table-cell>
          <table:table-cell table:style-name="表格5.E3" office:value-type="string">
            <text:p text:style-name="P16">O(n log n)</text:p>
          </table:table-cell>
        </table:table-row>
        <table:table-row table:style-name="表格5.1">
          <table:table-cell table:style-name="表格5.A4" office:value-type="string">
            <text:p text:style-name="P155">3</text:p>
          </table:table-cell>
          <table:table-cell table:style-name="表格5.B2" office:value-type="string">
            <text:p text:style-name="P15">f(n) 較大</text:p>
          </table:table-cell>
          <table:table-cell table:style-name="表格5.C2" office:value-type="string">
            <text:p text:style-name="P156">f(n) 佔主導</text:p>
          </table:table-cell>
          <table:table-cell table:style-name="表格5.D2" office:value-type="string">
            <text:p text:style-name="P35">T(n)=2T(n/2)+n²</text:p>
          </table:table-cell>
          <table:table-cell table:style-name="表格5.E4" office:value-type="string">
            <text:p text:style-name="P18">O(n²)</text:p>
          </table:table-cell>
        </table:table-row>
      </table:table>
      <text:p text:style-name="P34"/>
      <text:p text:style-name="P11"><text:span text:style-name="T9">✏️ <text:s/></text:span><text:span text:style-name="T3">完整計算範例</text:span></text:p>
      <text:p text:style-name="P31">例：T(n) = 2T(n/2) + n²</text:p>
      <text:p text:style-name="P26">Step 1：a=2, b=2, f(n)=n²</text:p>
      <text:p text:style-name="P27">Step 2：基準值 = n^(log₂2) = n^1 = n</text:p>
      <text:p text:style-name="P27">Step 3：比較 f(n)=n² 與 基準=n，n² 較大（Case 3）</text:p>
      <text:p text:style-name="P28">結論：T(n) = O(n²)</text:p>
      <text:p text:style-name="P10"/>
      <text:p text:style-name="P31">例：T(n) = 2T(n/2) + n（Merge Sort）</text:p>
      <text:p text:style-name="P26">基準值 = n^(log₂2) = n，f(n)=n，兩者相等（Case 2）</text:p>
      <text:p text:style-name="P28">→ O(n log n)</text:p>
      <text:p text:style-name="P24"/>
      <text:p text:style-name="P7"><text:span text:style-name="T1">第十一章 <text:s/></text:span><text:span text:style-name="T2">n! 的成長與 Stirling 公式</text:span></text:p>
      <text:p text:style-name="P8"/>
      <text:p text:style-name="P11"><text:soft-page-break/><text:span text:style-name="T9">💀 <text:s/></text:span><text:span text:style-name="T3">n! 成長速度實際數字</text:span></text:p>
      <text:p text:style-name="P26">n=5 <text:s text:c="2"/>→ <text:s/>5! <text:s/>= 120</text:p>
      <text:p text:style-name="P27">n=10 <text:s/>→ <text:s/>10! = 3,628,800</text:p>
      <text:p text:style-name="P27">n=20 <text:s/>→ <text:s/>20! = 超過 2 千兆</text:p>
      <text:p text:style-name="P28">n=100 → <text:s/>100! = 電腦根本無法完成</text:p>
      <text:p text:style-name="P10"/>
      <text:p text:style-name="P11"><text:span text:style-name="T9">📐 <text:s/></text:span><text:span text:style-name="T12">Stirling 公式（估計 n! 大小）</text:span></text:p>
      <text:p text:style-name="P157">n! <text:s/>≈ <text:s/>√(2πn) · (n/e)ⁿ</text:p>
      <text:p text:style-name="P8"/>
      <text:list text:continue-numbering="true" text:style-name="WWNum2">
        <text:list-item>
          <text:p text:style-name="P22">Stirling 公式用來「估計 n! 的成長有多誇張」</text:p>
        </text:list-item>
        <text:list-item>
          <text:p text:style-name="P22">它確認了 n! 的成長速度比 2ⁿ 更快</text:p>
        </text:list-item>
        <text:list-item>
          <text:p text:style-name="P22">考試只需知道用途：<text:span text:style-name="T10">n! &gt;&gt; 2ⁿ</text:span>，證明 n! 爆炸成長</text:p>
        </text:list-item>
      </text:list>
      <text:p text:style-name="P24"/>
      <text:p text:style-name="P7"><text:span text:style-name="T1">第十二章 <text:s/></text:span><text:span text:style-name="T2">實際考題精析</text:span></text:p>
      <text:p text:style-name="P8"/>
      <text:p text:style-name="P11"><text:span text:style-name="T9">📝 <text:s/></text:span><text:span text:style-name="T86">111關Q1・Big-O 化簡（三小題）</text:span></text:p>
      <text:p text:style-name="P81"/>
      <text:p text:style-name="P31">【第①小題】</text:p>
      <text:p text:style-name="P26">2022n ln n + 111n^1.001 = ?</text:p>
      <text:p text:style-name="P36"/>
      <text:p text:style-name="P27">比較：ln n <text:s/>vs <text:s/>n^0.001</text:p>
      <text:p text:style-name="P27">→ n^0.001 = n 的 0.001 次方，成長比 ln n 快</text:p>
      <text:p text:style-name="P27">→ 最高次項是 n × n^0.001 = n^1.001</text:p>
      <text:p text:style-name="P27">答案：O(n^1.001)</text:p>
      <text:p text:style-name="P28">（若原題是 n ln n vs n 的比較，則最高次項是 n ln n → O(n ln n)）</text:p>
      <text:p text:style-name="P10"/>
      <text:p text:style-name="P31">【第②小題】</text:p>
      <text:p text:style-name="P26">2022·n²·2ⁿ + 111·n³·3ⁿ = ?</text:p>
      <text:p text:style-name="P36"/>
      <text:p text:style-name="P27">比較：n²·2ⁿ <text:s/>vs <text:s/>n³·3ⁿ</text:p>
      <text:p text:style-name="P27">→ 3ⁿ 成長遠快於 2ⁿ（n=10時：2¹⁰=1024，3¹⁰=59049）</text:p>
      <text:p text:style-name="P27">→ n³·3ⁿ &gt;&gt; n²·2ⁿ</text:p>
      <text:p text:style-name="P28">答案：O(n³·3ⁿ)</text:p>
      <text:p text:style-name="P81"/>
      <text:p text:style-name="P30">⚠️ 常見錯誤：誤以為 n²·2ⁿ 是答案。請記住：底數越大的指數函數成長越快，3ⁿ &gt;&gt; 2ⁿ，所以第二項 n³·3ⁿ 主導！</text:p>
      <text:p text:style-name="P10"/>
      <text:p text:style-name="P31">【第③小題】</text:p>
      <text:p text:style-name="P26">2022·n! + 2ⁿ = ?</text:p>
      <text:p text:style-name="P36"/>
      <text:p text:style-name="P27">由 Stirling 公式：n! ≈ √(2πn)·(n/e)ⁿ</text:p>
      <text:p text:style-name="P27">→ n! 成長遠快於 2ⁿ</text:p>
      <text:p text:style-name="P28">答案：O(n!)</text:p>
      <text:p text:style-name="P34"/>
      <text:p text:style-name="P11"><text:span text:style-name="T9">📝 <text:s/></text:span><text:span text:style-name="T25">115關Q1・Θ(Theta) 精確分析</text:span></text:p>
      <text:p text:style-name="P81"/>
      <text:p text:style-name="P31"><text:soft-page-break/>【第①題】</text:p>
      <text:p text:style-name="P26">for(i=0; i&lt;n; j+=2) <text:s text:c="4"/>// 注意：是 j+=2 不是 i+=2</text:p>
      <text:p text:style-name="P27"><text:s text:c="4"/>for(j=0; j&lt;i; j++) <text:s/>sum++</text:p>
      <text:p text:style-name="P36"/>
      <text:p text:style-name="P27">外圈 i 跑：0,1,2,...,n-1（共 n 次）</text:p>
      <text:p text:style-name="P27">內圈 j 跑：當 i=k 時，j=0,2,4,...&lt;k，共約 k/2 次</text:p>
      <text:p text:style-name="P27">（因為 j+=2，所以每次跳 2）</text:p>
      <text:p text:style-name="P36"/>
      <text:p text:style-name="P28">總次數 T = Σ(k/2) for k=0 to n-1 ≈ n²/4 <text:s/>→ <text:s/>Θ(n²)</text:p>
      <text:p text:style-name="P10"/>
      <text:p text:style-name="P31">【第②題】</text:p>
      <text:p text:style-name="P26">while(i&lt;n) {</text:p>
      <text:p text:style-name="P27"><text:s text:c="4"/>for(j=i; j&lt;=n; j++) sum++;</text:p>
      <text:p text:style-name="P27"><text:s text:c="4"/>i++;</text:p>
      <text:p text:style-name="P27">}</text:p>
      <text:p text:style-name="P36"/>
      <text:p text:style-name="P27">第1輪 i=0：for 跑 n+1 次</text:p>
      <text:p text:style-name="P27">第2輪 i=1：for 跑 n 次</text:p>
      <text:p text:style-name="P27">第3輪 i=2：for 跑 n-1 次</text:p>
      <text:p text:style-name="P27">...</text:p>
      <text:p text:style-name="P28">總次數 = (n+1)+n+(n-1)+...+2+1 ≈ n²/2 <text:s/>→ <text:s/>Θ(n²)</text:p>
      <text:p text:style-name="P34"/>
      <text:p text:style-name="P11"><text:span text:style-name="T9">📝 <text:s/></text:span><text:span text:style-name="T20">115關Q1・甲O(n log n) vs 乙O(n²) 實際比較</text:span></text:p>
      <text:p text:style-name="P81"/>
      <text:p text:style-name="P31">Big-O 忽略常數，但實際執行時常數很重要：</text:p>
      <text:p text:style-name="P81"/>
      <text:p text:style-name="P26">情況一：n 很小時</text:p>
      <text:p text:style-name="P27">→ 甲的迴圈有 overhead（常數 c 很大）</text:p>
      <text:p text:style-name="P27">→ 甲的實際時間 &gt; 乙的簡單雙迴圈</text:p>
      <text:p text:style-name="P27">→ 乙反而更快！</text:p>
      <text:p text:style-name="P36"/>
      <text:p text:style-name="P27">情況二：乙=insertion sort，資料已排序</text:p>
      <text:p text:style-name="P27">→ 乙退化為 O(n)，甲=merge sort 永遠 O(n log n)</text:p>
      <text:p text:style-name="P27">→ 乙反而更快！</text:p>
      <text:p text:style-name="P36"/>
      <text:p text:style-name="P27">情況三：n 夠大且無序資料</text:p>
      <text:p text:style-name="P28">→ 甲的 O(n log n) 才真正發揮優勢</text:p>
      <text:p text:style-name="P8"/>
      <text:p text:style-name="P32">核心概念：Big-O 是理論漸近，小 n 時常數影響更大；實際表現要看資料特性和實作細節。</text:p>
      <text:p text:style-name="P24"/>
      <text:p text:style-name="P7"><text:span text:style-name="T1">第十三章 <text:s/></text:span><text:span text:style-name="T2">常見演算法複雜度對比</text:span></text:p>
      <text:p text:style-name="P8"/>
      <table:table table:name="表格6" table:style-name="表格6">
        <table:table-column table:style-name="表格6.A"/>
        <table:table-column table:style-name="表格6.B" table:number-columns-repeated="3"/>
        <table:table-column table:style-name="表格6.E"/>
        <table:table-header-rows>
          <table:table-row table:style-name="表格6.1">
            <table:table-cell table:style-name="表格6.A1" office:value-type="string">
              <text:p text:style-name="P12">演算法</text:p>
            </table:table-cell>
            <table:table-cell table:style-name="表格6.A1" office:value-type="string">
              <text:p text:style-name="P12">平均</text:p>
            </table:table-cell>
            <table:table-cell table:style-name="表格6.A1" office:value-type="string">
              <text:p text:style-name="P12">最佳</text:p>
            </table:table-cell>
            <table:table-cell table:style-name="表格6.A1" office:value-type="string">
              <text:p text:style-name="P12">最壞</text:p>
            </table:table-cell>
            <table:table-cell table:style-name="表格6.A1" office:value-type="string">
              <text:p text:style-name="P12">核心原因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P158">Binary Search</text:p>
          </table:table-cell>
          <table:table-cell table:style-name="表格6.B2" office:value-type="string">
            <text:p text:style-name="P159">O(log n)</text:p>
          </table:table-cell>
          <table:table-cell table:style-name="表格6.C2" office:value-type="string">
            <text:p text:style-name="P160">O(1)</text:p>
          </table:table-cell>
          <table:table-cell table:style-name="表格6.D2" office:value-type="string">
            <text:p text:style-name="P161">O(log n)</text:p>
          </table:table-cell>
          <table:table-cell table:style-name="表格6.E2" office:value-type="string">
            <text:p text:style-name="P15">每次砍半，一次找到最好</text:p>
          </table:table-cell>
        </table:table-row>
        <table:table-row table:style-name="表格6.1">
          <table:table-cell table:style-name="表格6.A2" office:value-type="string">
            <text:p text:style-name="P158">Merge Sort</text:p>
          </table:table-cell>
          <table:table-cell table:style-name="表格6.B2" office:value-type="string">
            <text:p text:style-name="P159">O(n log n)</text:p>
          </table:table-cell>
          <table:table-cell table:style-name="表格6.C2" office:value-type="string">
            <text:p text:style-name="P160">O(n log n)</text:p>
          </table:table-cell>
          <table:table-cell table:style-name="表格6.D2" office:value-type="string">
            <text:p text:style-name="P161">O(n log n)</text:p>
          </table:table-cell>
          <table:table-cell table:style-name="表格6.E3" office:value-type="string">
            <text:p text:style-name="P15">永不退化，保證穩定</text:p>
          </table:table-cell>
        </table:table-row>
        <table:table-row table:style-name="表格6.1">
          <table:table-cell table:style-name="表格6.A2" office:value-type="string">
            <text:p text:style-name="P158">Quick Sort</text:p>
          </table:table-cell>
          <table:table-cell table:style-name="表格6.B2" office:value-type="string">
            <text:p text:style-name="P159">O(n log n)</text:p>
          </table:table-cell>
          <table:table-cell table:style-name="表格6.C2" office:value-type="string">
            <text:p text:style-name="P160">O(n)</text:p>
          </table:table-cell>
          <table:table-cell table:style-name="表格6.D2" office:value-type="string">
            <text:p text:style-name="P161">O(n²)</text:p>
          </table:table-cell>
          <table:table-cell table:style-name="表格6.E4" office:value-type="string">
            <text:p text:style-name="P15">pivot 選爛退化</text:p>
          </table:table-cell>
        </table:table-row>
        <text:soft-page-break/>
        <table:table-row table:style-name="表格6.1">
          <table:table-cell table:style-name="表格6.A2" office:value-type="string">
            <text:p text:style-name="P158">Bubble Sort</text:p>
          </table:table-cell>
          <table:table-cell table:style-name="表格6.B5" office:value-type="string">
            <text:p text:style-name="P162">O(n²)</text:p>
          </table:table-cell>
          <table:table-cell table:style-name="表格6.C2" office:value-type="string">
            <text:p text:style-name="P160">O(n)</text:p>
          </table:table-cell>
          <table:table-cell table:style-name="表格6.D2" office:value-type="string">
            <text:p text:style-name="P161">O(n²)</text:p>
          </table:table-cell>
          <table:table-cell table:style-name="表格6.E5" office:value-type="string">
            <text:p text:style-name="P15">雙層迴圈效率低</text:p>
          </table:table-cell>
        </table:table-row>
        <table:table-row table:style-name="表格6.1">
          <table:table-cell table:style-name="表格6.A2" office:value-type="string">
            <text:p text:style-name="P158">線性搜尋</text:p>
          </table:table-cell>
          <table:table-cell table:style-name="表格6.B2" office:value-type="string">
            <text:p text:style-name="P159">O(n)</text:p>
          </table:table-cell>
          <table:table-cell table:style-name="表格6.C2" office:value-type="string">
            <text:p text:style-name="P160">O(1)</text:p>
          </table:table-cell>
          <table:table-cell table:style-name="表格6.D2" office:value-type="string">
            <text:p text:style-name="P161">O(n)</text:p>
          </table:table-cell>
          <table:table-cell table:style-name="表格6.E6" office:value-type="string">
            <text:p text:style-name="P15">全部掃一遍</text:p>
          </table:table-cell>
        </table:table-row>
      </table:table>
      <text:p text:style-name="P24"/>
      <text:p text:style-name="P7"><text:span text:style-name="T1">第十四章 <text:s/></text:span><text:span text:style-name="T2">公職考試最常見陷阱</text:span></text:p>
      <text:p text:style-name="P8"/>
      <table:table table:name="表格7" table:style-name="表格7">
        <table:table-column table:style-name="表格7.A"/>
        <table:table-column table:style-name="表格7.B"/>
        <table:table-header-rows>
          <table:table-row table:style-name="表格7.1">
            <table:table-cell table:style-name="表格7.A1" office:value-type="string">
              <text:p text:style-name="P12">常見錯誤認知</text:p>
            </table:table-cell>
            <table:table-cell table:style-name="表格7.A1" office:value-type="string">
              <text:p text:style-name="P12">正確觀念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163">❌ <text:s/>不化簡</text:p>
          </table:table-cell>
          <table:table-cell table:style-name="表格7.B2" office:value-type="string">
            <text:p text:style-name="P158">✅ <text:s/>n²+n+1 應寫 O(n²)，不是 O(n²+n+1)</text:p>
          </table:table-cell>
        </table:table-row>
        <table:table-row table:style-name="表格7.1">
          <table:table-cell table:style-name="表格7.A2" office:value-type="string">
            <text:p text:style-name="P163">❌ <text:s/>巢狀迴圈全是 O(n²)</text:p>
          </table:table-cell>
          <table:table-cell table:style-name="表格7.B3" office:value-type="string">
            <text:p text:style-name="P158">✅ <text:s/>外圈 O(log n) + 內圈 O(n) = O(n log n)</text:p>
          </table:table-cell>
        </table:table-row>
        <table:table-row table:style-name="表格7.1">
          <table:table-cell table:style-name="表格7.A2" office:value-type="string">
            <text:p text:style-name="P163">❌ <text:s/>Quick Sort 永遠 O(n log n)</text:p>
          </table:table-cell>
          <table:table-cell table:style-name="表格7.B2" office:value-type="string">
            <text:p text:style-name="P158">✅ <text:s/>最壞情況（已排序資料）是 O(n²)</text:p>
          </table:table-cell>
        </table:table-row>
        <table:table-row table:style-name="表格7.1">
          <table:table-cell table:style-name="表格7.A2" office:value-type="string">
            <text:p text:style-name="P163">❌ <text:s/>2ⁿ 與 n² 混淆</text:p>
          </table:table-cell>
          <table:table-cell table:style-name="表格7.B3" office:value-type="string">
            <text:p text:style-name="P158">✅ <text:s/>n=100：n²=10,000；2ⁿ=天文數字，差距無限大</text:p>
          </table:table-cell>
        </table:table-row>
        <table:table-row table:style-name="表格7.1">
          <table:table-cell table:style-name="表格7.A2" office:value-type="string">
            <text:p text:style-name="P163">❌ <text:s/>log n 的意義不清楚</text:p>
          </table:table-cell>
          <table:table-cell table:style-name="表格7.B2" office:value-type="string">
            <text:p text:style-name="P158">✅ <text:s/>就是「可以砍半幾次」，Binary Search 的核心</text:p>
          </table:table-cell>
        </table:table-row>
        <table:table-row table:style-name="表格7.1">
          <table:table-cell table:style-name="表格7.A2" office:value-type="string">
            <text:p text:style-name="P163">❌ <text:s/>看到遞迴就恐慌</text:p>
          </table:table-cell>
          <table:table-cell table:style-name="表格7.B3" office:value-type="string">
            <text:p text:style-name="P158">✅ <text:s/>T(n)=T(n/2)+1 只是砍半，直接 O(log n)</text:p>
          </table:table-cell>
        </table:table-row>
        <table:table-row table:style-name="表格7.1">
          <table:table-cell table:style-name="表格7.A2" office:value-type="string">
            <text:p text:style-name="P163">❌ <text:s/>n 很小時 Big-O 大=一定慢</text:p>
          </table:table-cell>
          <table:table-cell table:style-name="表格7.B2" office:value-type="string">
            <text:p text:style-name="P158">✅ <text:s/>小 n 時常數 c 影響更大，O(n²) 可能比 O(n log n) 快</text:p>
          </table:table-cell>
        </table:table-row>
      </table:table>
      <text:p text:style-name="P24"/>
      <text:p text:style-name="P7"><text:span text:style-name="T1">第十五章 <text:s/></text:span><text:span text:style-name="T2">學習路線圖</text:span></text:p>
      <text:p text:style-name="P8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151">第一步</text:p>
          </table:table-cell>
          <table:table-cell table:style-name="表格8.B1" office:value-type="string">
            <text:p text:style-name="P164">先背複雜度排序：O(1) &lt; O(log n) &lt; O(n) &lt; O(n log n) &lt; O(n²) &lt; O(2ⁿ) &lt; O(n!)</text:p>
          </table:table-cell>
        </table:table-row>
        <table:table-row table:style-name="表格8.1">
          <table:table-cell table:style-name="表格8.A2" office:value-type="string">
            <text:p text:style-name="P153">第二步</text:p>
          </table:table-cell>
          <table:table-cell table:style-name="表格8.B2" office:value-type="string">
            <text:p text:style-name="P164">看到迴圈就問：「這段總共執行幾次？」培養計算次數的直覺</text:p>
          </table:table-cell>
        </table:table-row>
        <table:table-row table:style-name="表格8.1">
          <table:table-cell table:style-name="表格8.A3" office:value-type="string">
            <text:p text:style-name="P155">第三步</text:p>
          </table:table-cell>
          <table:table-cell table:style-name="表格8.B3" office:value-type="string">
            <text:p text:style-name="P164">學會等差累加：1+2+3+...+n ≈ n²/2 → O(n²)，這是高頻考題</text:p>
          </table:table-cell>
        </table:table-row>
        <table:table-row table:style-name="表格8.1">
          <table:table-cell table:style-name="表格8.A4" office:value-type="string">
            <text:p text:style-name="P165">第四步</text:p>
          </table:table-cell>
          <table:table-cell table:style-name="表格8.B4" office:value-type="string">
            <text:p text:style-name="P164">搞懂 Binary Search、Merge Sort、Quick Sort 三大核心演算法</text:p>
          </table:table-cell>
        </table:table-row>
        <table:table-row table:style-name="表格8.1">
          <table:table-cell table:style-name="表格8.A2" office:value-type="string">
            <text:p text:style-name="P166">第五步</text:p>
          </table:table-cell>
          <table:table-cell table:style-name="表格8.B5" office:value-type="string">
            <text:p text:style-name="P164">練習 Master Theorem，快速判斷遞迴式</text:p>
          </table:table-cell>
        </table:table-row>
        <table:table-row table:style-name="表格8.1">
          <table:table-cell table:style-name="表格8.A6" office:value-type="string">
            <text:p text:style-name="P167">第六步</text:p>
          </table:table-cell>
          <table:table-cell table:style-name="表格8.B6" office:value-type="string">
            <text:p text:style-name="P164">刷歷屆考古題，特別留意 Quick Sort 最壞情況與巢狀迴圈變形題</text:p>
          </table:table-cell>
        </table:table-row>
      </table:table>
      <text:p text:style-name="P24"/>
      <text:p text:style-name="P7"><text:span text:style-name="T1">第十六章 <text:s/></text:span><text:span text:style-name="T2">快速參考卡（考前必看）</text:span></text:p>
      <text:p text:style-name="P8"/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table:number-columns-spanned="3" office:value-type="string">
            <text:p text:style-name="P168">考試必備速查表</text:p>
          </table:table-cell>
          <table:covered-table-cell/>
          <table:covered-table-cell/>
        </table:table-row>
        <table:table-row table:style-name="表格9.1">
          <table:table-cell table:style-name="表格9.A2" office:value-type="string">
            <text:p text:style-name="P12">Big-O 排序</text:p>
          </table:table-cell>
          <table:table-cell table:style-name="表格9.B2" office:value-type="string">
            <text:p text:style-name="P12">迴圈模式</text:p>
          </table:table-cell>
          <table:table-cell table:style-name="表格9.C2" office:value-type="string">
            <text:p text:style-name="P12">遞迴式速查</text:p>
          </table:table-cell>
        </table:table-row>
        <text:soft-page-break/>
        <table:table-row table:style-name="表格9.1">
          <table:table-cell table:style-name="表格9.A3" office:value-type="string">
            <text:p text:style-name="P169">O(1) &lt; O(log n)</text:p>
            <text:p text:style-name="P169">&lt; O(n)</text:p>
            <text:p text:style-name="P169">&lt; O(n log n)</text:p>
            <text:p text:style-name="P169">&lt; O(n²)</text:p>
            <text:p text:style-name="P169">&lt; O(2ⁿ)</text:p>
            <text:p text:style-name="P169">&lt; O(n!)</text:p>
            <text:p text:style-name="P170"/>
            <text:p text:style-name="P169">log n &lt; √n &lt; n</text:p>
          </table:table-cell>
          <table:table-cell table:style-name="表格9.B3" office:value-type="string">
            <text:p text:style-name="P171">單層 for → O(n)</text:p>
            <text:p text:style-name="P171">雙層 for-for → O(n²)</text:p>
            <text:p text:style-name="P171">內圈跑 i → O(n²)</text:p>
            <text:p text:style-name="P171">i*=2 → O(log n)</text:p>
            <text:p text:style-name="P171">while n/=2 → O(log n)</text:p>
            <text:p text:style-name="P171">log×n 層 → O(n log n)</text:p>
            <text:p text:style-name="P170"/>
            <text:p text:style-name="P171">等差累加 → O(n²)</text:p>
          </table:table-cell>
          <table:table-cell table:style-name="表格9.C3" office:value-type="string">
            <text:p text:style-name="P172">T(n)=T(n/2)+1 →O(logn)</text:p>
            <text:p text:style-name="P172">T(n)=2T(n/2)+n →O(nlogn)</text:p>
            <text:p text:style-name="P172">T(n)=T(n-1)+n →O(n²)</text:p>
            <text:p text:style-name="P172">T(n)=2T(n/2)+n²→O(n²)</text:p>
            <text:p text:style-name="P172">Q(n)=Q(n-1)+2n-1→O(n²)</text:p>
            <text:p text:style-name="P170"/>
            <text:p text:style-name="P172">BS Best O(1)</text:p>
            <text:p text:style-name="P172">BS Worst/Avg O(logn)</text:p>
          </table:table-cell>
        </table:table-row>
      </table:table>
      <text:p text:style-name="P24"/>
      <text:p text:style-name="P173"><text:span text:style-name="T88">Big-O 的本質不是背公式　</text:span><text:span text:style-name="T89">而是「看到程式，立刻知道它跑幾次」的直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f2937" loext:opacity="10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1f2937" loext:opacity="10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117cm" fo:margin-bottom="2.117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25</meta:editing-cycles>
    <meta:creation-date>2026-05-24T09:04:52.466000000</meta:creation-date>
    <dc:date>2026-06-22T19:21:53.375883300</dc:date>
    <meta:generator>LibreOffice/26.2.4.2$Windows_X86_64 LibreOffice_project/0229ac93fcf0d7cbc6376066c6f35021cef002dc</meta:generator>
    <meta:editing-duration>PT19H57M56S</meta:editing-duration>
    <meta:document-statistic meta:table-count="16" meta:image-count="0" meta:object-count="0" meta:page-count="15" meta:paragraph-count="622" meta:word-count="6004" meta:character-count="12260" meta:non-whitespace-character-count="9698"/>
  </office:meta>
</office:document-meta>
</file>