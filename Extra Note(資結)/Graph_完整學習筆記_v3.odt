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2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" style:family="table">
      <style:table-properties style:width="17.191cm" fo:margin-left="0.002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" style:family="table">
      <style:table-properties style:width="17.19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" style:family="table">
      <style:table-properties style:width="17.191cm" fo:margin-left="0.002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5" style:family="table">
      <style:table-properties style:width="17.191cm" fo:margin-left="0.002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6" style:family="table">
      <style:table-properties style:width="17.191cm" fo:margin-left="0.002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7" style:family="table">
      <style:table-properties style:width="17.191cm" fo:margin-left="0.002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8" style:family="table">
      <style:table-properties style:width="17.191cm" fo:margin-left="0.002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9" style:family="table">
      <style:table-properties style:width="17.191cm" fo:margin-left="0.002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44" style:family="table">
      <style:table-properties style:width="17.191cm" fo:margin-left="0.002cm" fo:margin-top="0cm" fo:margin-bottom="0cm" table:align="left" style:writing-mode="page"/>
    </style:style>
    <style:style style:name="表格44.A" style:family="table-column">
      <style:table-column-properties style:column-width="17.19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45" style:family="table">
      <style:table-properties style:width="17.191cm" fo:margin-left="0.002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3" style:family="table">
      <style:table-properties style:width="17.191cm" fo:margin-left="0.002cm" fo:margin-top="0cm" fo:margin-bottom="0cm" table:align="left" style:writing-mode="page"/>
    </style:style>
    <style:style style:name="表格13.A" style:family="table-column">
      <style:table-column-properties style:column-width="3.351cm"/>
    </style:style>
    <style:style style:name="表格13.B" style:family="table-column">
      <style:table-column-properties style:column-width="3.173cm"/>
    </style:style>
    <style:style style:name="表格13.C" style:family="table-column">
      <style:table-column-properties style:column-width="3.175cm"/>
    </style:style>
    <style:style style:name="表格13.D" style:family="table-column">
      <style:table-column-properties style:column-width="3.611cm"/>
    </style:style>
    <style:style style:name="表格13.E" style:family="table-column">
      <style:table-column-properties style:column-width="3.8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3.B2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13.C2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3.E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3.B6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13.C6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14" style:family="table">
      <style:table-properties style:width="17.191cm" fo:margin-left="0.002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5" style:family="table">
      <style:table-properties style:width="17.191cm" fo:margin-left="0.002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6" style:family="table">
      <style:table-properties style:width="17.191cm" fo:margin-left="0.002cm" fo:margin-top="0cm" fo:margin-bottom="0cm" table:align="left" style:writing-mode="page"/>
    </style:style>
    <style:style style:name="表格16.A" style:family="table-column">
      <style:table-column-properties style:column-width="0.88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5.375cm"/>
    </style:style>
    <style:style style:name="表格16.D" style:family="table-column">
      <style:table-column-properties style:column-width="3.52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7" style:family="table">
      <style:table-properties style:width="17.191cm" fo:margin-left="0.002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8" style:family="table">
      <style:table-properties style:width="17.191cm" fo:margin-left="0.002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9" style:family="table">
      <style:table-properties style:width="17.191cm" fo:margin-left="0.002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0" style:family="table">
      <style:table-properties style:width="17.191cm" fo:margin-left="0.002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1" style:family="table">
      <style:table-properties style:width="17.191cm" fo:margin-left="0.002cm" fo:margin-top="0cm" fo:margin-bottom="0cm" table:align="left" style:writing-mode="page"/>
    </style:style>
    <style:style style:name="表格21.A" style:family="table-column">
      <style:table-column-properties style:column-width="0.88cm"/>
    </style:style>
    <style:style style:name="表格21.B" style:family="table-column">
      <style:table-column-properties style:column-width="4.235cm"/>
    </style:style>
    <style:style style:name="表格21.C" style:family="table-column">
      <style:table-column-properties style:column-width="5.549cm"/>
    </style:style>
    <style:style style:name="表格21.D" style:family="table-column">
      <style:table-column-properties style:column-width="2.999cm"/>
    </style:style>
    <style:style style:name="表格21.E" style:family="table-column">
      <style:table-column-properties style:column-width="3.5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1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2" style:family="table">
      <style:table-properties style:width="17.191cm" fo:margin-left="0.002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23" style:family="table">
      <style:table-properties style:width="17.191cm" fo:margin-left="0.002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24" style:family="table">
      <style:table-properties style:width="17.191cm" fo:margin-left="0.002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5" style:family="table">
      <style:table-properties style:width="17.191cm" fo:margin-left="0.002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6" style:family="table">
      <style:table-properties style:width="12.7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4.58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6.B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26.C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2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6.B3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26.B5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27" style:family="table">
      <style:table-properties style:width="17.191cm" fo:margin-left="0.002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8" style:family="table">
      <style:table-properties style:width="17.191cm" fo:margin-left="0.002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9" style:family="table">
      <style:table-properties style:width="17.191cm" fo:margin-left="0.002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0" style:family="table">
      <style:table-properties style:width="17.191cm" fo:margin-left="0.002cm" fo:margin-top="0cm" fo:margin-bottom="0cm" table:align="left" style:writing-mode="page"/>
    </style:style>
    <style:style style:name="表格30.A" style:family="table-column">
      <style:table-column-properties style:column-width="0.88cm"/>
    </style:style>
    <style:style style:name="表格30.B" style:family="table-column">
      <style:table-column-properties style:column-width="5.373cm"/>
    </style:style>
    <style:style style:name="表格30.C" style:family="table-column">
      <style:table-column-properties style:column-width="3.882cm"/>
    </style:style>
    <style:style style:name="表格30.D" style:family="table-column">
      <style:table-column-properties style:column-width="3.879cm"/>
    </style:style>
    <style:style style:name="表格30.E" style:family="table-column">
      <style:table-column-properties style:column-width="3.17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1" style:family="table">
      <style:table-properties style:width="17.191cm" fo:margin-left="0.002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32" style:family="table">
      <style:table-properties style:width="17.191cm" fo:margin-left="0.002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3" style:family="table">
      <style:table-properties style:width="17.191cm" fo:margin-left="0.002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4" style:family="table">
      <style:table-properties style:width="17.191cm" fo:margin-left="0.002cm" fo:margin-top="0cm" fo:margin-bottom="0cm" table:align="left" style:writing-mode="page"/>
    </style:style>
    <style:style style:name="表格34.A" style:family="table-column">
      <style:table-column-properties style:column-width="0.88cm"/>
    </style:style>
    <style:style style:name="表格34.B" style:family="table-column">
      <style:table-column-properties style:column-width="6.174cm"/>
    </style:style>
    <style:style style:name="表格34.C" style:family="table-column">
      <style:table-column-properties style:column-width="5.549cm"/>
    </style:style>
    <style:style style:name="表格34.D" style:family="table-column">
      <style:table-column-properties style:column-width="2.471cm"/>
    </style:style>
    <style:style style:name="表格34.E" style:family="table-column">
      <style:table-column-properties style:column-width="2.117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0d7b6c" fo:padding-left="0.229cm" fo:padding-right="0.229cm" fo:padding-top="0.141cm" fo:padding-bottom="0.141cm" fo:border="0.1pt solid #bbbbbb">
        <style:background-image/>
      </style:table-cell-properties>
    </style:style>
    <style:style style:name="表格34.A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34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4.B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4.C3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34.E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35" style:family="table">
      <style:table-properties style:width="17.191cm" fo:margin-left="0.002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36" style:family="table">
      <style:table-properties style:width="17.191cm" fo:margin-left="0.002cm" fo:margin-top="0cm" fo:margin-bottom="0cm" table:align="left" style:writing-mode="page"/>
    </style:style>
    <style:style style:name="表格36.A" style:family="table-column">
      <style:table-column-properties style:column-width="17.19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7" style:family="table">
      <style:table-properties style:width="17.191cm" fo:margin-left="0.002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8" style:family="table">
      <style:table-properties style:width="17.191cm" fo:margin-left="0.002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39" style:family="table">
      <style:table-properties style:width="17.191cm" fo:margin-left="0.002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0" style:family="table">
      <style:table-properties style:width="17.191cm" fo:margin-left="0.002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1" style:family="table">
      <style:table-properties style:width="17.191cm" fo:margin-left="0.002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42" style:family="table">
      <style:table-properties style:width="17.191cm" fo:margin-left="0.002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3" style:family="table">
      <style:table-properties style:width="17.191cm" fo:margin-left="0.002cm" fo:margin-top="0cm" fo:margin-bottom="0cm" table:align="left" style:writing-mode="page"/>
    </style:style>
    <style:style style:name="表格43.A" style:family="table-column">
      <style:table-column-properties style:column-width="4.408cm"/>
    </style:style>
    <style:style style:name="表格43.B" style:family="table-column">
      <style:table-column-properties style:column-width="5.02cm"/>
    </style:style>
    <style:style style:name="表格43.C" style:family="table-column">
      <style:table-column-properties style:column-width="7.763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7a5a00" fo:padding-left="0.229cm" fo:padding-right="0.229cm" fo:padding-top="0.141cm" fo:padding-bottom="0.141cm" fo:border="0.1pt solid #bbbbbb">
        <style:background-image/>
      </style:table-cell-properties>
    </style:style>
    <style:style style:name="表格43.A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43.C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3.A3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43.C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43.B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43.B7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43.B10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2" style:family="table">
      <style:table-properties style:width="17.191cm" fo:margin-left="0.002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10" style:family="table">
      <style:table-properties style:width="17.191cm" fo:margin-left="0.002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11" style:family="table">
      <style:table-properties style:width="17.191cm" fo:margin-left="0.002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6" style:family="table">
      <style:table-properties style:width="17.191cm" fo:margin-left="0.002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7" style:family="table">
      <style:table-properties style:width="17.191cm" fo:margin-left="0.002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ce0f7" fo:padding-left="0.353cm" fo:padding-right="0.353cm" fo:padding-top="0.053cm" fo:padding-bottom="0.053cm" fo:border="0.1pt solid #5a2d82">
        <style:background-image/>
      </style:table-cell-properties>
    </style:style>
    <style:style style:name="表格48" style:family="table">
      <style:table-properties style:width="17.191cm" fo:margin-left="0.002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9" style:family="table">
      <style:table-properties style:width="17.191cm" fo:margin-left="0.002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50" style:family="table">
      <style:table-properties style:width="17.191cm" fo:margin-left="0.002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f5cc" fo:padding-left="0.353cm" fo:padding-right="0.353cm" fo:padding-top="0.053cm" fo:padding-bottom="0.053cm" fo:border="0.1pt solid #7a5a00">
        <style:background-image/>
      </style:table-cell-properties>
    </style:style>
    <style:style style:name="表格51" style:family="table">
      <style:table-properties style:width="17.191cm" fo:margin-left="0.002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1">
      <style:paragraph-properties fo:margin-top="0cm" fo:margin-bottom="0.212cm" style:contextual-spacing="false" fo:break-before="pag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6" style:family="paragraph" style:parent-style-name="Heading_20_1">
      <style:paragraph-properties fo:margin-top="0.564cm" fo:margin-bottom="0.212cm" style:contextual-spacing="fals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  <style:text-properties fo:color="#1e5fa8" loext:opacity="100%" style:font-name="Arial" fo:font-size="21pt" fo:font-weight="bold" style:font-name-asian="Arial3" style:font-size-asian="21pt" style:font-weight-asian="bold" style:font-name-complex="Arial3" style:font-size-complex="21pt" style:font-weight-complex="bold"/>
    </style:style>
    <style:style style:name="P8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0d7b6c" loext:opacity="100%" style:font-name="Arial" fo:font-size="11.5pt" style:font-name-asian="Arial3" style:font-size-asian="11.5pt" style:font-name-complex="Arial3" style:font-size-complex="11.5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.318cm" fo:margin-bottom="0.106cm" style:contextual-spacing="false"/>
      <style:text-properties fo:color="#0d7b6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7" style:family="paragraph" style:parent-style-name="Standard">
      <style:paragraph-properties fo:margin-top="0.071cm" fo:margin-bottom="1.058cm" style:contextual-spacing="false" fo:text-align="center" style:justify-single-word="false"/>
      <style:text-properties fo:color="#404040" loext:opacity="100%" style:font-name="Arial" fo:font-size="9.5pt" fo:font-style="italic" style:font-name-asian="Arial3" style:font-size-asian="9.5pt" style:font-style-asian="italic" style:font-name-complex="Arial3" style:font-size-complex="9.5pt" style:font-style-complex="italic"/>
    </style:style>
    <style:style style:name="P18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  <style:text-properties fo:color="#404040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9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7a5a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officeooo:paragraph-rsid="005939f2"/>
    </style:style>
    <style:style style:name="P37" style:family="paragraph" style:parent-style-name="Standard">
      <style:paragraph-properties fo:margin-top="0.088cm" fo:margin-bottom="0cm" style:contextual-spacing="false"/>
      <style:text-properties officeooo:paragraph-rsid="005939f2"/>
    </style:style>
    <style:style style:name="P38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officeooo:paragraph-rsid="0085c82c"/>
    </style:style>
    <style:style style:name="P39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officeooo:paragraph-rsid="0085c82c" style:font-name-asian="Arial3" style:font-size-asian="12pt" style:font-weight-asian="bold" style:font-name-complex="Arial3" style:font-size-complex="12pt" style:font-weight-complex="bold"/>
    </style:style>
    <style:style style:name="P40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5939f2" style:font-name-asian="Arial3" style:font-size-asian="9.5pt" style:font-weight-asian="bold" style:font-name-complex="Arial3" style:font-size-complex="9.5pt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5939f2" style:font-name-asian="Courier New1" style:font-size-asian="9pt" style:font-name-complex="Courier New1" style:font-size-complex="9pt"/>
    </style:style>
    <style:style style:name="P42" style:family="paragraph" style:parent-style-name="Standard">
      <style:paragraph-properties fo:margin-top="0.071cm" fo:margin-bottom="0.071cm" style:contextual-spacing="false"/>
      <style:text-properties officeooo:paragraph-rsid="0085c82c"/>
    </style:style>
    <style:style style:name="P43" style:family="paragraph" style:parent-style-name="Standard">
      <style:paragraph-properties fo:margin-top="0.088cm" fo:margin-bottom="0cm" style:contextual-spacing="false"/>
      <style:text-properties officeooo:paragraph-rsid="0085c82c"/>
    </style:style>
    <style:style style:name="P44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officeooo:paragraph-rsid="0085c82c"/>
    </style:style>
    <style:style style:name="P45" style:family="paragraph" style:parent-style-name="Standard">
      <style:paragraph-properties fo:margin-top="0cm" fo:margin-bottom="0cm" style:contextual-spacing="false"/>
      <style:text-properties officeooo:paragraph-rsid="0085c82c"/>
    </style:style>
    <style:style style:name="T1" style:family="text"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T2" style:family="text"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fo:background-color="#64ffda" loext:char-shading-value="0"/>
    </style:style>
    <style:style style:name="T5" style:family="text">
      <style:text-properties fo:background-color="#64ffda" loext:char-shading-value="0"/>
    </style:style>
    <style:style style:name="T6" style:family="text">
      <style:text-properties fo:font-weight="bold" fo:background-color="#00e676" loext:char-shading-value="0" style:font-weight-asian="bold" style:font-weight-complex="bold"/>
    </style:style>
    <style:style style:name="T7" style:family="text">
      <style:text-properties fo:font-weight="bold" fo:background-color="#ffd74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fo:background-color="#ff4081" loext:char-shading-value="0" style:font-weight-asian="bold" style:font-weight-complex="bold"/>
    </style:style>
    <style:style style:name="T11" style:family="text">
      <style:text-properties fo:background-color="#ffd740" loext:char-shading-value="0"/>
    </style:style>
    <style:style style:name="T12" style:family="text">
      <style:text-properties fo:background-color="#ffd740" loext:char-shading-value="0"/>
    </style:style>
    <style:style style:name="T13" style:family="text">
      <style:text-properties fo:color="#ff1744" loext:opacity="100%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color="#18ffff" loext:opacity="100%"/>
    </style:style>
    <style:style style:name="T17" style:family="text">
      <style:text-properties fo:color="#18ffff" loext:opacity="100%" fo:background-color="#d500f9" loext:char-shading-value="0"/>
    </style:style>
    <style:style style:name="T18" style:family="text">
      <style:text-properties fo:color="#18ffff" loext:opacity="100%" fo:background-color="#d500f9" loext:char-shading-value="0"/>
    </style:style>
    <style:style style:name="T1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background-color="#000000" loext:char-shading-value="0"/>
    </style:style>
    <style:style style:name="T23" style:family="text">
      <style:text-properties fo:color="#18ffff" loext:opacity="100%" fo:background-color="#000000" loext:char-shading-value="0"/>
    </style:style>
    <style:style style:name="T24" style:family="text">
      <style:text-properties fo:background-color="#d500f9" loext:char-shading-value="0"/>
    </style:style>
    <style:style style:name="T25" style:family="text">
      <style:text-properties fo:background-color="#d500f9" loext:char-shading-value="0"/>
    </style:style>
    <style:style style:name="T26" style:family="text">
      <style:text-properties fo:background-color="#f50057" loext:char-shading-value="0"/>
    </style:style>
    <style:style style:name="T27" style:family="text">
      <style:text-properties fo:background-color="#f50057" loext:char-shading-value="0"/>
    </style:style>
    <style:style style:name="T2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29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2" style:family="text">
      <style:text-properties fo:color="#ffd740" loext:opacity="100%"/>
    </style:style>
    <style:style style:name="T3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3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35" style:family="text">
      <style:text-properties fo:color="#ffd740" loext:opacity="100%" fo:background-color="#000000" loext:char-shading-value="0"/>
    </style:style>
    <style:style style:name="T36" style:family="text">
      <style:text-properties fo:color="#ffd740" loext:opacity="100%" fo:background-color="#000000" loext:char-shading-value="0"/>
    </style:style>
    <style:style style:name="T37" style:family="text">
      <style:text-properties fo:color="#ffff00" loext:opacity="100%"/>
    </style:style>
    <style:style style:name="T38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40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4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ffff00" loext:opacity="100%" fo:background-color="#ff9100" loext:char-shading-value="0"/>
    </style:style>
    <style:style style:name="T44" style:family="text">
      <style:text-properties fo:color="#ffff00" loext:opacity="100%" fo:background-color="#ff9100" loext:char-shading-value="0"/>
    </style:style>
    <style:style style:name="T45" style:family="text">
      <style:text-properties fo:color="#ffff00" loext:opacity="100%" fo:background-color="#3d5afe" loext:char-shading-value="0"/>
    </style:style>
    <style:style style:name="T46" style:family="text">
      <style:text-properties fo:color="#ff3d00" loext:opacity="100%"/>
    </style:style>
    <style:style style:name="T47" style:family="text">
      <style:text-properties fo:color="#ff3d00" loext:opacity="100%" fo:background-color="#64ffda" loext:char-shading-value="0"/>
    </style:style>
    <style:style style:name="T48" style:family="text">
      <style:text-properties fo:color="#ff3d00" loext:opacity="100%" fo:background-color="#64ffda" loext:char-shading-value="0"/>
    </style:style>
    <style:style style:name="T4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1" style:family="text">
      <style:text-properties fo:color="#00e676" loext:opacity="100%"/>
    </style:style>
    <style:style style:name="T5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76ff03" loext:opacity="100%"/>
    </style:style>
    <style:style style:name="T54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5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56" style:family="text">
      <style:text-properties fo:color="#76ff03" loext:opacity="100%" fo:font-weight="bold" fo:background-color="#64ffda" loext:char-shading-value="0" style:font-weight-asian="bold" style:font-weight-complex="bold"/>
    </style:style>
    <style:style style:name="T57" style:family="text">
      <style:text-properties fo:color="#76ff03" loext:opacity="100%" fo:background-color="#651fff" loext:char-shading-value="0"/>
    </style:style>
    <style:style style:name="T58" style:family="text">
      <style:text-properties fo:color="#76ff03" loext:opacity="100%" fo:background-color="#f50057" loext:char-shading-value="0"/>
    </style:style>
    <style:style style:name="T59" style:family="text">
      <style:text-properties fo:color="#76ff03" loext:opacity="100%" fo:background-color="#f50057" loext:char-shading-value="0"/>
    </style:style>
    <style:style style:name="T60" style:family="text">
      <style:text-properties fo:background-color="#651fff" loext:char-shading-value="0"/>
    </style:style>
    <style:style style:name="T61" style:family="text">
      <style:text-properties fo:background-color="#651fff" loext:char-shading-value="0"/>
    </style:style>
    <style:style style:name="T62" style:family="text">
      <style:text-properties fo:color="#eeff41" loext:opacity="100%" fo:background-color="#f50057" loext:char-shading-value="0"/>
    </style:style>
    <style:style style:name="T6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64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65" style:family="text">
      <style:text-properties fo:background-color="#ff4081" loext:char-shading-value="0"/>
    </style:style>
    <style:style style:name="T66" style:family="text">
      <style:text-properties fo:background-color="#3d5afe" loext:char-shading-value="0"/>
    </style:style>
    <style:style style:name="T67" style:family="text">
      <style:text-properties fo:background-color="#3d5afe" loext:char-shading-value="0"/>
    </style:style>
    <style:style style:name="T68" style:family="text">
      <style:text-properties fo:color="#e040fb" loext:opacity="100%" fo:background-color="#ffd740" loext:char-shading-value="0"/>
    </style:style>
    <style:style style:name="T69" style:family="text"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圖形 (Graph) 完整學習筆記</text:p>
      <text:p text:style-name="P12">BFS · DFS · Topological Sort · Prim MST · Adjacency Multilist</text:p>
      <text:p text:style-name="P17">含完整圖解 · 演算法逐步追蹤 · 時間/空間複雜度推導 · 考試申論題</text:p>
      <text:p text:style-name="Standard"/>
      <text:h text:style-name="P5" text:outline-level="1">一、Graph（圖）基本概念與圖示</text:h>
      <text:p text:style-name="P18">Graph = 頂點（Vertex）+ 邊（Edge）的集合，用來表示元素之間的關係。</text:p>
      <text:p text:style-name="P1"/>
      <text:p text:style-name="P8"><text:s text:c="2"/>▎ 無向圖（<text:span text:style-name="T13">Undirected Graph</text:span>）範例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6"><text:s text:c="7"/>A</text:p>
          </table:table-cell>
        </table:table-row>
        <table:table-row table:style-name="表格1.1">
          <table:table-cell table:style-name="表格1.A1" office:value-type="string">
            <text:p text:style-name="P26"><text:s text:c="6"/>/ \</text:p>
          </table:table-cell>
        </table:table-row>
        <table:table-row table:style-name="表格1.1">
          <table:table-cell table:style-name="表格1.A1" office:value-type="string">
            <text:p text:style-name="P26"><text:s text:c="5"/>/ <text:s text:c="2"/>\</text:p>
          </table:table-cell>
        </table:table-row>
        <table:table-row table:style-name="表格1.1">
          <table:table-cell table:style-name="表格1.A1" office:value-type="string">
            <text:p text:style-name="P26"><text:s text:c="4"/>B-----C</text:p>
          </table:table-cell>
        </table:table-row>
        <table:table-row table:style-name="表格1.1">
          <table:table-cell table:style-name="表格1.A1" office:value-type="string">
            <text:p text:style-name="P26"><text:s text:c="4"/>|</text:p>
          </table:table-cell>
        </table:table-row>
        <table:table-row table:style-name="表格1.1">
          <table:table-cell table:style-name="表格1.A1" office:value-type="string">
            <text:p text:style-name="P26"><text:s text:c="4"/>D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6"><text:s text:c="2"/>頂點（Vertex）：A B C D</text:p>
          </table:table-cell>
        </table:table-row>
        <table:table-row table:style-name="表格1.1">
          <table:table-cell table:style-name="表格1.A1" office:value-type="string">
            <text:p text:style-name="P26"><text:s text:c="2"/>邊 <text:s/>（Edge） <text:s/>：A-B <text:s/>A-C <text:s/>B-C <text:s/>B-D</text:p>
          </table:table-cell>
        </table:table-row>
        <table:table-row table:style-name="表格1.1">
          <table:table-cell table:style-name="表格1.A1" office:value-type="string">
            <text:p text:style-name="P26"><text:s text:c="2"/><text:span text:style-name="T6">B 的 Degree <text:s text:c="2"/>= 3</text:span>（連到 A、C、D）</text:p>
          </table:table-cell>
        </table:table-row>
      </table:table>
      <text:p text:style-name="P1"/>
      <text:p text:style-name="P8"><text:s text:c="2"/>▎ 有向圖（<text:span text:style-name="T13">Directed Graph</text:span>）與 DAG 範例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7"/>A ──→ B ──→ D</text:p>
          </table:table-cell>
        </table:table-row>
        <table:table-row table:style-name="表格2.1">
          <table:table-cell table:style-name="表格2.A1" office:value-type="string">
            <text:p text:style-name="P26"><text:s text:c="7"/>│ <text:s text:c="8"/>↗</text:p>
          </table:table-cell>
        </table:table-row>
        <table:table-row table:style-name="表格2.1">
          <table:table-cell table:style-name="表格2.A1" office:value-type="string">
            <text:p text:style-name="P26"><text:s text:c="7"/>↓ <text:s text:c="6"/>╱</text:p>
          </table:table-cell>
        </table:table-row>
        <table:table-row table:style-name="表格2.1">
          <table:table-cell table:style-name="表格2.A1" office:value-type="string">
            <text:p text:style-name="P26"><text:s text:c="7"/>C ────╱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6"><text:s text:c="2"/>A→B <text:s/>A→C <text:s/>B→D <text:s/>C→D</text:p>
          </table:table-cell>
        </table:table-row>
        <table:table-row table:style-name="表格2.1">
          <table:table-cell table:style-name="表格2.A1" office:value-type="string">
            <text:p text:style-name="P26"><text:s text:c="2"/><text:span text:style-name="T7">in-degree(A)=0</text:span> <text:s/><text:span text:style-name="T7">in-degree(B)=1</text:span> <text:s/><text:span text:style-name="T7">in-degree(C)=1</text:span> <text:s/><text:span text:style-name="T7">in-degree(D)=2</text:span></text:p>
          </table:table-cell>
        </table:table-row>
        <table:table-row table:style-name="表格2.1">
          <table:table-cell table:style-name="表格2.A1" office:value-type="string">
            <text:p text:style-name="P26"><text:s text:c="2"/>此圖無 Cycle → 是 DAG（有向無環圖）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>專有名詞</text:p>
          </table:table-cell>
          <table:table-cell table:style-name="表格3.A1" office:value-type="string">
            <text:p text:style-name="P9">說明</text:p>
          </table:table-cell>
        </table:table-row>
        <table:table-row table:style-name="表格3.1">
          <table:table-cell table:style-name="表格3.A2" office:value-type="string">
            <text:p text:style-name="P9">Vertex（頂點）</text:p>
          </table:table-cell>
          <table:table-cell table:style-name="表格3.B2" office:value-type="string">
            <text:p text:style-name="P19">圖中每個節點。例：城市、課程、工作項目</text:p>
          </table:table-cell>
        </table:table-row>
        <table:table-row table:style-name="表格3.1">
          <table:table-cell table:style-name="表格3.B2" office:value-type="string">
            <text:p text:style-name="P9">Edge（邊）</text:p>
          </table:table-cell>
          <table:table-cell table:style-name="表格3.B2" office:value-type="string">
            <text:p text:style-name="P19">頂點之間的連線。有向邊有箭頭方向，無向邊雙向皆可</text:p>
          </table:table-cell>
        </table:table-row>
        <table:table-row table:style-name="表格3.1">
          <table:table-cell table:style-name="表格3.A2" office:value-type="string">
            <text:p text:style-name="P9">Degree</text:p>
          </table:table-cell>
          <table:table-cell table:style-name="表格3.B2" office:value-type="string">
            <text:p text:style-name="P19">一個頂點連接的邊數。有向圖分<text:span text:style-name="T19"> in-degree（進入）</text:span>與 <text:span text:style-name="T28">out-degree（離開）</text:span></text:p>
          </table:table-cell>
        </table:table-row>
        <table:table-row table:style-name="表格3.1">
          <table:table-cell table:style-name="表格3.B2" office:value-type="string">
            <text:p text:style-name="P9">DAG</text:p>
          </table:table-cell>
          <table:table-cell table:style-name="表格3.B2" office:value-type="string">
            <text:p text:style-name="P19">Directed Acyclic Graph，有向無環圖，Topological Sort 的前提條件</text:p>
          </table:table-cell>
        </table:table-row>
        <table:table-row table:style-name="表格3.1">
          <table:table-cell table:style-name="表格3.A2" office:value-type="string">
            <text:p text:style-name="P9">Sparse / Dense</text:p>
          </table:table-cell>
          <table:table-cell table:style-name="表格3.B2" office:value-type="string">
            <text:p text:style-name="P19">稀疏圖：邊少（|E| ≪ V²）；稠密圖：邊多（|E| 接近 V²）</text:p>
          </table:table-cell>
        </table:table-row>
      </table:table>
      <text:p text:style-name="Standard"/>
      <text:h text:style-name="P5" text:outline-level="1">二、圖的三種表示法（含完整圖解）</text:h>
      <text:h text:style-name="P4" text:outline-level="2">2-1 Adjacency Matrix（<text:span text:style-name="T11">相鄰矩陣</text:span>）</text:h>
      <text:p text:style-name="P18"><text:span text:style-name="T8">把圖</text:span><text:span text:style-name="T49">轉成一張 V×V 的二維表格</text:span>，<text:span text:style-name="T19">兩點有邊填 1（或權重）</text:span>，<text:span text:style-name="T29">無邊填 0</text:span>。</text:p>
      <text:p text:style-name="P1"/>
      <text:p text:style-name="P8"><text:s text:c="2"/>▎ 建構過程圖解（以 A-B、A-C、B-C 三條邊為例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6"><text:s text:c="2"/>圖形： <text:s text:c="19"/>轉成矩陣：</text:p>
          </table:table-cell>
        </table:table-row>
        <table:table-row table:style-name="表格4.1">
          <table:table-cell table:style-name="表格4.A1" office:value-type="string">
            <text:p text:style-name="P26"><text:s text:c="30"/>A <text:s/>B <text:s/>C</text:p>
          </table:table-cell>
        </table:table-row>
        <table:table-row table:style-name="表格4.1">
          <table:table-cell table:style-name="表格4.A1" office:value-type="string">
            <text:p text:style-name="P26"><text:s text:c="4"/>A ─── B <text:s text:c="13"/>A <text:s/>[ 0 <text:s/>1 <text:s/>1 ]</text:p>
          </table:table-cell>
        </table:table-row>
        <table:table-row table:style-name="表格4.1">
          <table:table-cell table:style-name="表格4.A1" office:value-type="string">
            <text:p text:style-name="P26"><text:s text:c="5"/>\ <text:s text:c="2"/>/ <text:s text:c="14"/>B <text:s/>[ 1 <text:s/>0 <text:s/>1 ]</text:p>
          </table:table-cell>
        </table:table-row>
        <table:table-row table:style-name="表格4.1">
          <table:table-cell table:style-name="表格4.A1" office:value-type="string">
            <text:p text:style-name="P26"><text:s text:c="6"/>\ / <text:s text:c="15"/>C <text:s/>[ 1 <text:s/>1 <text:s/>0 ]</text:p>
          </table:table-cell>
        </table:table-row>
        <table:table-row table:style-name="表格4.1">
          <table:table-cell table:style-name="表格4.A1" office:value-type="string">
            <text:p text:style-name="P26"><text:s text:c="7"/>C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6"><text:s text:c="2"/>規則：</text:p>
          </table:table-cell>
        </table:table-row>
        <table:table-row table:style-name="表格4.1">
          <table:table-cell table:style-name="表格4.A1" office:value-type="string">
            <text:p text:style-name="P26"><text:s text:c="4"/><text:span text:style-name="T7">A-B 有邊</text:span> <text:s/>→ <text:s/><text:span text:style-name="T8">matrix[A][B]=1 且 matrix[B][A]=1</text:span> <text:s/>（無向圖對稱）</text:p>
          </table:table-cell>
        </table:table-row>
        <table:table-row table:style-name="表格4.1">
          <table:table-cell table:style-name="表格4.A1" office:value-type="string">
            <text:p text:style-name="P26"><text:s text:c="4"/><text:span text:style-name="T7">A-C 有邊</text:span> <text:s/>→ <text:s/><text:span text:style-name="T8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6"><text:s text:c="4"/><text:span text:style-name="T7">B-C 有邊</text:span> <text:s/>→ <text:s/><text:span text:style-name="T8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6"><text:s text:c="4"/>對角線 <text:s text:c="3"/>→ <text:s/>自己到自己 = 0</text:p>
          </table:table-cell>
        </table:table-row>
      </table:table>
      <text:p text:style-name="P1"/>
      <text:p text:style-name="P8"><text:s text:c="2"/>▎ <text:span text:style-name="T17">空間複雜度 O(V²) </text:span>推導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6"><text:s text:c="2"/>問：為什麼空間是 <text:span text:style-name="T19">O(V²)</text:span>？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6"><text:s text:c="2"/><text:span text:style-name="T39">矩陣大小</text:span> = <text:span text:style-name="T52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6"><text:s text:c="2"/>範例：V=1000 個頂點</text:p>
          </table:table-cell>
        </table:table-row>
        <table:table-row table:style-name="表格5.1">
          <table:table-cell table:style-name="表格5.A1" office:value-type="string">
            <text:p text:style-name="P26"><text:s text:c="4"/>需要 1000 × 1000 = 1,000,000 個格子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6"><text:s text:c="2"/>即使只有 10 條邊，也要開 100 萬格 → 浪費！</text:p>
          </table:table-cell>
        </table:table-row>
        <table:table-row table:style-name="表格5.1">
          <table:table-cell table:style-name="表格5.A1" office:value-type="string">
            <text:p text:style-name="P26"><text:s text:c="2"/>所以：稀疏圖用矩陣很不划算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6"><text:s text:c="2"/>但稠密圖（邊很多）：每格只要 1 bit → 非常精簡</text:p>
          </table:table-cell>
        </table:table-row>
        <table:table-row table:style-name="表格5.1">
          <table:table-cell table:style-name="表格5.A1" office:value-type="string">
            <text:p text:style-name="P26"><text:s text:c="2"/>1,000,000 bits = 約 122 KB（很小！）</text:p>
          </table:table-cell>
        </table:table-row>
      </table:table>
      <text:p text:style-name="P1"/>
      <text:p text:style-name="P8"><text:s text:c="2"/>▎ 查邊速度 O(1) 推導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6"><text:s text:c="2"/>問：<text:span text:style-name="T8">A 和 B 之間有沒有邊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6"><text:s text:c="2"/><text:span text:style-name="T33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6"><text:s text:c="2"/><text:span text:style-name="T33">→ 一步就知道答案</text:span>，不需要搜尋</text:p>
          </table:table-cell>
        </table:table-row>
        <table:table-row table:style-name="表格6.1">
          <table:table-cell table:style-name="表格6.A1" office:value-type="string">
            <text:p text:style-name="P26"><text:s text:c="2"/>→ <text:span text:style-name="T28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6"><text:s text:c="2"/>問：<text:span text:style-name="T8">計算所有頂點的 Degree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6"><text:s text:c="2"/><text:span text:style-name="T52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6"><text:s text:c="2"/><text:span text:style-name="T19">全部 V 個頂點都要算 → V × O(V)</text:span> = O(V²) = O(n²)</text:p>
          </table:table-cell>
        </table:table-row>
      </table:table>
      <text:h text:style-name="P4" text:outline-level="2">2-2 Adjacency List（<text:span text:style-name="T11">相鄰串列</text:span>）</text:h>
      <text:p text:style-name="P18"><text:span text:style-name="T49">每個頂點建一條鏈結串列，只記錄「真正存在」的鄰居</text:span>，不存 0。</text:p>
      <text:p text:style-name="P1"/>
      <text:p text:style-name="P8"><text:s text:c="2"/>▎ 建構過程圖解（同一張圖）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6"><text:s text:c="2"/>圖形： <text:s text:c="19"/>轉成串列：</text:p>
          </table:table-cell>
        </table:table-row>
        <table:table-row table:style-name="表格7.1">
          <table:table-cell table:style-name="表格7.A1" office:value-type="string">
            <text:p text:style-name="P26"><text:s text:c="28"/></text:p>
          </table:table-cell>
        </table:table-row>
        <table:table-row table:style-name="表格7.1">
          <table:table-cell table:style-name="表格7.A1" office:value-type="string">
            <text:p text:style-name="P26"><text:s text:c="4"/>A ─── B <text:s text:c="13"/>A <text:s/>→ <text:s/>[B] <text:s/>→ <text:s/>[C] <text:s/>→ <text:s/>NULL</text:p>
          </table:table-cell>
        </table:table-row>
        <text:soft-page-break/>
        <table:table-row table:style-name="表格7.1">
          <table:table-cell table:style-name="表格7.A1" office:value-type="string">
            <text:p text:style-name="P26"><text:s text:c="5"/>\ <text:s text:c="2"/>/ <text:s text:c="14"/>B <text:s/>→ <text:s/>[A] <text:s/>→ <text:s/>[C] <text:s/>→ <text:s/>NULL</text:p>
          </table:table-cell>
        </table:table-row>
        <table:table-row table:style-name="表格7.1">
          <table:table-cell table:style-name="表格7.A1" office:value-type="string">
            <text:p text:style-name="P26"><text:s text:c="6"/>\ / <text:s text:c="15"/>C <text:s/>→ <text:s/>[A] <text:s/>→ <text:s/>[B] <text:s/>→ <text:s/>NULL</text:p>
          </table:table-cell>
        </table:table-row>
        <table:table-row table:style-name="表格7.1">
          <table:table-cell table:style-name="表格7.A1" office:value-type="string">
            <text:p text:style-name="P26"><text:s text:c="7"/>C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6"><text:s text:c="2"/><text:span text:style-name="T33">只存「有邊」的部分</text:span>，不存 0</text:p>
          </table:table-cell>
        </table:table-row>
        <table:table-row table:style-name="表格7.1">
          <table:table-cell table:style-name="表格7.A1" office:value-type="string">
            <text:p text:style-name="P26"><text:s text:c="2"/><text:span text:style-name="T38">A-B 這條邊出現兩次</text:span>：在 A 的串列 + 在 B 的串列</text:p>
          </table:table-cell>
        </table:table-row>
        <table:table-row table:style-name="表格7.1">
          <table:table-cell table:style-name="表格7.A1" office:value-type="string">
            <text:p text:style-name="P26"><text:s text:c="2"/>（這就是 <text:span text:style-name="T30">Adjacency List 的缺點：同一條邊存兩份</text:span>）</text:p>
          </table:table-cell>
        </table:table-row>
      </table:table>
      <text:p text:style-name="P1"/>
      <text:p text:style-name="P8"><text:s text:c="2"/>▎ <text:span text:style-name="T17">空間複雜度 O(V+E) </text:span>推導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6"><text:s text:c="2"/><text:span text:style-name="T7">總共需要儲存的資料</text:span>：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6"><text:s text:c="2"/>① <text:span text:style-name="T38">V 個頂點的「起始節點」</text:span> <text:s text:c="6"/>→ <text:span text:style-name="T19">V 個單元</text:span></text:p>
          </table:table-cell>
        </table:table-row>
        <table:table-row table:style-name="表格8.1">
          <table:table-cell table:style-name="表格8.A1" office:value-type="string">
            <text:p text:style-name="P26"><text:s text:c="2"/>② <text:span text:style-name="T38">每條邊在兩端各存一次</text:span><text:span text:style-name="T51"> </text:span><text:s text:c="9"/>→ <text:span text:style-name="T19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6"><text:s text:c="2"/><text:span text:style-name="T19">總空間 = V + 2E</text:span> = O(V + E)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6"><text:s text:c="2"/>範例比較（V=1000，只有 10 條邊）：</text:p>
          </table:table-cell>
        </table:table-row>
        <table:table-row table:style-name="表格8.1">
          <table:table-cell table:style-name="表格8.A1" office:value-type="string">
            <text:p text:style-name="P26"><text:s text:c="4"/>矩陣：1000 × 1000 = 1,000,000 格</text:p>
          </table:table-cell>
        </table:table-row>
        <table:table-row table:style-name="表格8.1">
          <table:table-cell table:style-name="表格8.A1" office:value-type="string">
            <text:p text:style-name="P26"><text:s text:c="4"/>串列：1000 + 2×10 <text:s/>= <text:s text:c="5"/>1,020 格</text:p>
          </table:table-cell>
        </table:table-row>
        <table:table-row table:style-name="表格8.1">
          <table:table-cell table:style-name="表格8.A1" office:value-type="string">
            <text:p text:style-name="P26"><text:s text:c="4"/>→ 差了將近 1000 倍！</text:p>
          </table:table-cell>
        </table:table-row>
      </table:table>
      <text:p text:style-name="P1"/>
      <text:p text:style-name="P40"><text:s text:c="2"/>▎ 查邊速度 O(degree) 推導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1"><text:s text:c="2"/>⚠ 先搞清楚一個初學者最常誤解的地方！</text:p>
          </table:table-cell>
        </table:table-row>
        <table:table-row table:style-name="表格9.1">
          <table:table-cell table:style-name="表格9.A1" office:value-type="string">
            <text:p text:style-name="P36"/>
          </table:table-cell>
        </table:table-row>
        <table:table-row table:style-name="表格9.1">
          <table:table-cell table:style-name="表格9.A1" office:value-type="string">
            <text:p text:style-name="P41"><text:s text:c="2"/><text:span text:style-name="T9">A 的鄰接串列</text:span>：<text:span text:style-name="T34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36"/>
          </table:table-cell>
        </table:table-row>
        <table:table-row table:style-name="表格9.1">
          <table:table-cell table:style-name="表格9.A1" office:value-type="string">
            <text:p text:style-name="P41"><text:s text:c="2"/><text:span text:style-name="T9">這裡的箭頭</text:span><text:span text:style-name="T50">「→」是 Linked List 的 next 指標</text:span>，</text:p>
          </table:table-cell>
        </table:table-row>
        <table:table-row table:style-name="表格9.1">
          <table:table-cell table:style-name="表格9.A1" office:value-type="string">
            <text:p text:style-name="P41"><text:s text:c="2"/><text:span text:style-name="T54">意思是「下一個節點」</text:span>，<text:span text:style-name="T64">不是圖的邊！</text:span></text:p>
          </table:table-cell>
        </table:table-row>
        <table:table-row table:style-name="表格9.1">
          <table:table-cell table:style-name="表格9.A1" office:value-type="string">
            <text:p text:style-name="P36"/>
          </table:table-cell>
        </table:table-row>
        <table:table-row table:style-name="表格9.1">
          <table:table-cell table:style-name="表格9.A1" office:value-type="string">
            <text:p text:style-name="P41"><text:s text:c="2"/><text:span text:style-name="T34">正確的解讀方式</text:span>：</text:p>
          </table:table-cell>
        </table:table-row>
        <table:table-row table:style-name="表格9.1">
          <table:table-cell table:style-name="表格9.A1" office:value-type="string">
            <text:p text:style-name="P41"><text:s text:c="4"/><text:span text:style-name="T20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36"/>
          </table:table-cell>
        </table:table-row>
        <table:table-row table:style-name="表格9.1">
          <table:table-cell table:style-name="表格9.A1" office:value-type="string">
            <text:p text:style-name="P41"><text:s text:c="2"/><text:span text:style-name="T41">錯誤的解讀方式（千萬別這樣想！）</text:span>：</text:p>
          </table:table-cell>
        </table:table-row>
        <table:table-row table:style-name="表格9.1">
          <table:table-cell table:style-name="表格9.A1" office:value-type="string">
            <text:p text:style-name="P41"><text:s text:c="4"/><text:span text:style-name="T55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36"/>
          </table:table-cell>
        </table:table-row>
        <table:table-row table:style-name="表格9.1">
          <table:table-cell table:style-name="表格9.A1" office:value-type="string">
            <text:p text:style-name="P41"><text:s text:c="2"/>正確圖形長這樣：</text:p>
          </table:table-cell>
        </table:table-row>
        <table:table-row table:style-name="表格9.1">
          <table:table-cell table:style-name="表格9.A1" office:value-type="string">
            <text:p text:style-name="P41"><text:s text:c="7"/>B</text:p>
          </table:table-cell>
        </table:table-row>
        <table:table-row table:style-name="表格9.1">
          <table:table-cell table:style-name="表格9.A1" office:value-type="string">
            <text:p text:style-name="P41"><text:s text:c="7"/>|</text:p>
          </table:table-cell>
        </table:table-row>
        <table:table-row table:style-name="表格9.1">
          <table:table-cell table:style-name="表格9.A1" office:value-type="string">
            <text:p text:style-name="P41"><text:s text:c="7"/>A</text:p>
          </table:table-cell>
        </table:table-row>
        <table:table-row table:style-name="表格9.1">
          <table:table-cell table:style-name="表格9.A1" office:value-type="string">
            <text:p text:style-name="P41"><text:s text:c="6"/>/ \</text:p>
          </table:table-cell>
        </table:table-row>
        <table:table-row table:style-name="表格9.1">
          <table:table-cell table:style-name="表格9.A1" office:value-type="string">
            <text:p text:style-name="P41"><text:s text:c="5"/>C <text:s text:c="2"/>D</text:p>
          </table:table-cell>
        </table:table-row>
        <table:table-row table:style-name="表格9.1">
          <table:table-cell table:style-name="表格9.A1" office:value-type="string">
            <text:p text:style-name="P41"><text:s text:c="2"/>（<text:span text:style-name="T20">A 分別連到 B、C、D</text:span>，<text:span text:style-name="T55">B/C/D 彼此之間沒有邊</text:span>）</text:p>
          </table:table-cell>
        </table:table-row>
      </table:table>
      <text:p text:style-name="P37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41"><text:s text:c="2"/>現在來看：查 A 和 D 之間有沒有邊？</text:p>
          </table:table-cell>
        </table:table-row>
        <table:table-row table:style-name="表格44.1">
          <table:table-cell table:style-name="表格44.A1" office:value-type="string">
            <text:p text:style-name="P36"/>
          </table:table-cell>
        </table:table-row>
        <table:table-row table:style-name="表格44.1">
          <table:table-cell table:style-name="表格44.A1" office:value-type="string">
            <text:p text:style-name="P41"><text:s text:c="2"/>A 的鄰接串列：[B] → [C] → [D] → NULL</text:p>
          </table:table-cell>
        </table:table-row>
        <table:table-row table:style-name="表格44.1">
          <table:table-cell table:style-name="表格44.A1" office:value-type="string">
            <text:p text:style-name="P36"/>
          </table:table-cell>
        </table:table-row>
        <table:table-row table:style-name="表格44.1">
          <table:table-cell table:style-name="表格44.A1" office:value-type="string">
            <text:p text:style-name="P41"><text:s text:c="2"/>因為串列沒有排序，你不知道 D 藏在哪裡，</text:p>
          </table:table-cell>
        </table:table-row>
        <table:table-row table:style-name="表格44.1">
          <table:table-cell table:style-name="表格44.A1" office:value-type="string">
            <text:p text:style-name="P41"><text:s text:c="2"/>只能從頭一個一個往後找：</text:p>
          </table:table-cell>
        </table:table-row>
        <table:table-row table:style-name="表格44.1">
          <table:table-cell table:style-name="表格44.A1" office:value-type="string">
            <text:p text:style-name="P41"><text:s text:c="4"/>第 1 步：看 B，不是 D，繼續</text:p>
          </table:table-cell>
        </table:table-row>
        <table:table-row table:style-name="表格44.1">
          <table:table-cell table:style-name="表格44.A1" office:value-type="string">
            <text:p text:style-name="P41"><text:s text:c="4"/>第 2 步：看 C，不是 D，繼續</text:p>
          </table:table-cell>
        </table:table-row>
        <table:table-row table:style-name="表格44.1">
          <table:table-cell table:style-name="表格44.A1" office:value-type="string">
            <text:p text:style-name="P41"><text:s text:c="4"/>第 3 步：看 D，找到了！停止</text:p>
          </table:table-cell>
        </table:table-row>
        <table:table-row table:style-name="表格44.1">
          <table:table-cell table:style-name="表格44.A1" office:value-type="string">
            <text:p text:style-name="P41"><text:s text:c="2"/>→ 走了 3 步，找到答案：A 和 D 有邊</text:p>
          </table:table-cell>
        </table:table-row>
        <text:soft-page-break/>
        <table:table-row table:style-name="表格44.1">
          <table:table-cell table:style-name="表格44.A1" office:value-type="string">
            <text:p text:style-name="P36"/>
          </table:table-cell>
        </table:table-row>
        <table:table-row table:style-name="表格44.1">
          <table:table-cell table:style-name="表格44.A1" office:value-type="string">
            <text:p text:style-name="P41"><text:s text:c="2"/>最壞情況 1：目標在串列最尾端</text:p>
          </table:table-cell>
        </table:table-row>
        <table:table-row table:style-name="表格44.1">
          <table:table-cell table:style-name="表格44.A1" office:value-type="string">
            <text:p text:style-name="P41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1"><text:s text:c="4"/>查 E：B → C → D → E <text:s/>→ 走 4 步才找到</text:p>
          </table:table-cell>
        </table:table-row>
        <table:table-row table:style-name="表格44.1">
          <table:table-cell table:style-name="表格44.A1" office:value-type="string">
            <text:p text:style-name="P36"/>
          </table:table-cell>
        </table:table-row>
        <table:table-row table:style-name="表格44.1">
          <table:table-cell table:style-name="表格44.A1" office:value-type="string">
            <text:p text:style-name="P41"><text:s text:c="2"/>最壞情況 2：目標根本不存在</text:p>
          </table:table-cell>
        </table:table-row>
        <table:table-row table:style-name="表格44.1">
          <table:table-cell table:style-name="表格44.A1" office:value-type="string">
            <text:p text:style-name="P41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1"><text:s text:c="4"/>查 F：B → C → D → E → NULL <text:s/>→ 走 4 步，走到底才確認沒有</text:p>
          </table:table-cell>
        </table:table-row>
        <table:table-row table:style-name="表格44.1">
          <table:table-cell table:style-name="表格44.A1" office:value-type="string">
            <text:p text:style-name="P36"/>
          </table:table-cell>
        </table:table-row>
        <table:table-row table:style-name="表格44.1">
          <table:table-cell table:style-name="表格44.A1" office:value-type="string">
            <text:p text:style-name="P41"><text:s text:c="2"/>兩種最壞情況，都必須把整條串列從頭走到尾。</text:p>
          </table:table-cell>
        </table:table-row>
      </table:table>
      <text:p text:style-name="P37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1"><text:s text:c="2"/><text:span text:style-name="T20">為什麼時間是 O(degree)，而不是 O(V)</text:span>？</text:p>
          </table:table-cell>
        </table:table-row>
        <table:table-row table:style-name="表格45.1">
          <table:table-cell table:style-name="表格45.A1" office:value-type="string">
            <text:p text:style-name="P36"/>
          </table:table-cell>
        </table:table-row>
        <table:table-row table:style-name="表格45.1">
          <table:table-cell table:style-name="表格45.A1" office:value-type="string">
            <text:p text:style-name="P41"><text:s/><text:span text:style-name="T50"><text:s/>degree(A) = A 連出去的邊數 = A 的鄰接串列長度</text:span></text:p>
          </table:table-cell>
        </table:table-row>
        <table:table-row table:style-name="表格45.1">
          <table:table-cell table:style-name="表格45.A1" office:value-type="string">
            <text:p text:style-name="P36"/>
          </table:table-cell>
        </table:table-row>
        <table:table-row table:style-name="表格45.1">
          <table:table-cell table:style-name="表格45.A1" office:value-type="string">
            <text:p text:style-name="P41"><text:s text:c="2"/>範例：圖有 1000 個頂點（V=1000），但 A 只連了 3 個頂點</text:p>
          </table:table-cell>
        </table:table-row>
        <table:table-row table:style-name="表格45.1">
          <table:table-cell table:style-name="表格45.A1" office:value-type="string">
            <text:p text:style-name="P41"><text:s text:c="4"/><text:span text:style-name="T34">A 的串列：[B] → [C] → [D] → NULL</text:span></text:p>
          </table:table-cell>
        </table:table-row>
        <table:table-row table:style-name="表格45.1">
          <table:table-cell table:style-name="表格45.A1" office:value-type="string">
            <text:p text:style-name="P36"/>
          </table:table-cell>
        </table:table-row>
        <table:table-row table:style-name="表格45.1">
          <table:table-cell table:style-name="表格45.A1" office:value-type="string">
            <text:p text:style-name="P41"><text:s text:c="4"/><text:span text:style-name="T9">查 A 和 D 是否相鄰：</text:span></text:p>
          </table:table-cell>
        </table:table-row>
        <table:table-row table:style-name="表格45.1">
          <table:table-cell table:style-name="表格45.A1" office:value-type="string">
            <text:p text:style-name="P41"><text:s text:c="4"/><text:span text:style-name="T41">最多只走 3 步 → O(3) = O(degree(A))</text:span></text:p>
          </table:table-cell>
        </table:table-row>
        <table:table-row table:style-name="表格45.1">
          <table:table-cell table:style-name="表格45.A1" office:value-type="string">
            <text:p text:style-name="P41"><text:s text:c="4"/><text:span text:style-name="T9">根本不需要掃描其他 997 個頂點</text:span>！</text:p>
          </table:table-cell>
        </table:table-row>
        <table:table-row table:style-name="表格45.1">
          <table:table-cell table:style-name="表格45.A1" office:value-type="string">
            <text:p text:style-name="P36"/>
          </table:table-cell>
        </table:table-row>
        <table:table-row table:style-name="表格45.1">
          <table:table-cell table:style-name="表格45.A1" office:value-type="string">
            <text:p text:style-name="P41"><text:s text:c="2"/>所以 <text:span text:style-name="T31">O(degree) 比 O(V) 更精確</text:span>：</text:p>
          </table:table-cell>
        </table:table-row>
        <table:table-row table:style-name="表格45.1">
          <table:table-cell table:style-name="表格45.A1" office:value-type="string">
            <text:p text:style-name="P41"><text:s text:c="4"/>O(degree(A)) ≤ O(V-1) = O(V) <text:s/>（degree 最大是 V-1）</text:p>
          </table:table-cell>
        </table:table-row>
        <table:table-row table:style-name="表格45.1">
          <table:table-cell table:style-name="表格45.A1" office:value-type="string">
            <text:p text:style-name="P41"><text:s text:c="4"/>在稀疏圖中 degree &lt;&lt; V，因此通常遠比 O(V) 快</text:p>
          </table:table-cell>
        </table:table-row>
      </table:table>
      <text:h text:style-name="P38" text:outline-level="2"><text:span text:style-name="T2">2-3 Adjacency Multilist（相鄰多重串列）</text:span></text:h>
      <text:p text:style-name="P42"><text:span text:style-name="T69">先記住這一句話：Adjacency Multilist = 為了讓「同一條邊只存一次」而發明的資料結構。</text:span></text:p>
      <text:p text:style-name="P43"/>
      <text:p text:style-name="P44"><text:span text:style-name="T1"><text:s text:c="2"/>▎ 第一步：先看 Adjacency List 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5"><text:span text:style-name="T3"><text:s text:c="2"/>圖形： <text:s text:c="22"/>三條邊：(A,B) <text:s/>(A,C) <text:s/>(B,C)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A ----- B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5"/>\ <text:s text:c="4"/>/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6"/>\ <text:s text:c="2"/>/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8"/>C</text:span></text:p>
          </table:table-cell>
        </table:table-row>
        <table:table-row table:style-name="表格12.1">
          <table:table-cell table:style-name="表格12.A1" office:value-type="string">
            <text:p text:style-name="P45"/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2"/>用 Adjacency List 存：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A → [B] → [C] → NULL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B → [A] → [C] → NULL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C → [A] → [B] → NULL</text:span></text:p>
          </table:table-cell>
        </table:table-row>
        <table:table-row table:style-name="表格12.1">
          <table:table-cell table:style-name="表格12.A1" office:value-type="string">
            <text:p text:style-name="P45"/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2"/>仔細數數看：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邊 (A,B) 存了兩份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邊 (A,C) 存了兩份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4"/>邊 (B,C) 存了兩份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45"/>
          </table:table-cell>
        </table:table-row>
        <table:table-row table:style-name="表格12.1">
          <table:table-cell table:style-name="表格12.A1" office:value-type="string">
            <text:p text:style-name="P45"><text:span text:style-name="T3"><text:s text:c="2"/>→ 3 條邊，卻存了 6 份資料！</text:span></text:p>
          </table:table-cell>
        </table:table-row>
      </table:table>
      <text:p text:style-name="P43"/>
      <text:p text:style-name="P44"><text:span text:style-name="T1"><text:s text:c="2"/>▎ 第二步：為什麼存兩份是問題？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5"><text:span text:style-name="T3"><text:s text:c="2"/>假設要刪除邊 A-B：</text:span></text:p>
          </table:table-cell>
        </table:table-row>
        <table:table-row table:style-name="表格10.1">
          <table:table-cell table:style-name="表格10.A1" office:value-type="string">
            <text:p text:style-name="P45"/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2"/>你必須同時修改兩個地方：</text:span></text:p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4"/>① A 的串列中，刪掉 B</text:span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45"><text:span text:style-name="T3"><text:s text:c="4"/>② B 的串列中，刪掉 A</text:span></text:p>
          </table:table-cell>
        </table:table-row>
        <table:table-row table:style-name="表格10.1">
          <table:table-cell table:style-name="表格10.A1" office:value-type="string">
            <text:p text:style-name="P45"/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2"/>如果只改一邊，就會造成資料不一致：</text:span></text:p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4"/>A 沒有 B <text:s/>←→ <text:s/>B 卻還有 A <text:s/>→ 資料壞掉！</text:span></text:p>
          </table:table-cell>
        </table:table-row>
        <table:table-row table:style-name="表格10.1">
          <table:table-cell table:style-name="表格10.A1" office:value-type="string">
            <text:p text:style-name="P45"/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2"/>有人就想：能不能讓一條邊只存一份？</text:span></text:p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2"/>這樣刪除時只要改一個地方就好。</text:span></text:p>
          </table:table-cell>
        </table:table-row>
        <table:table-row table:style-name="表格10.1">
          <table:table-cell table:style-name="表格10.A1" office:value-type="string">
            <text:p text:style-name="P45"><text:span text:style-name="T3"><text:s text:c="2"/>→ 這就是 Adjacency Multilist 的發明動機。</text:span></text:p>
          </table:table-cell>
        </table:table-row>
      </table:table>
      <text:p text:style-name="P43"/>
      <text:p text:style-name="P44"><text:span text:style-name="T1"><text:s text:c="2"/>▎ 第三步：Multilist 的核心想法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5"><text:span text:style-name="T3"><text:s text:c="2"/>以前（Adjacency List）：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4"/>邊 A-B 存兩份： <text:s/>A → [B] <text:s text:c="2"/>和 <text:s text:c="2"/>B → [A]</text:span></text:p>
          </table:table-cell>
        </table:table-row>
        <table:table-row table:style-name="表格11.1">
          <table:table-cell table:style-name="表格11.A1" office:value-type="string">
            <text:p text:style-name="P45"/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2"/>現在（Multilist）：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4"/>邊 A-B 只建立一個 Edge 節點 e1，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4"/>A 和 B 兩端都直接指向它：</text:span></text:p>
          </table:table-cell>
        </table:table-row>
        <table:table-row table:style-name="表格11.1">
          <table:table-cell table:style-name="表格11.A1" office:value-type="string">
            <text:p text:style-name="P45"/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8"/>A ─────┐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15"/>▼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15"/>e1 = (A, B)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15"/>▲</text:span></text:p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8"/>B ─────┘</text:span></text:p>
          </table:table-cell>
        </table:table-row>
        <table:table-row table:style-name="表格11.1">
          <table:table-cell table:style-name="表格11.A1" office:value-type="string">
            <text:p text:style-name="P45"/>
          </table:table-cell>
        </table:table-row>
        <table:table-row table:style-name="表格11.1">
          <table:table-cell table:style-name="表格11.A1" office:value-type="string">
            <text:p text:style-name="P45"><text:span text:style-name="T3"><text:s text:c="2"/>→ A 和 B 共用同一個 e1，不再各自存一份。</text:span></text:p>
          </table:table-cell>
        </table:table-row>
      </table:table>
      <text:p text:style-name="P43"/>
      <text:p text:style-name="P44"><text:span text:style-name="T1"><text:s text:c="2"/>▎ 第四步：三條邊時，建立三個 Edge 節點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45"><text:span text:style-name="T3"><text:s text:c="2"/>圖形有三條邊 → 只建立三個 Edge 節點（不是六個！）</text:span></text:p>
          </table:table-cell>
        </table:table-row>
        <table:table-row table:style-name="表格46.1">
          <table:table-cell table:style-name="表格46.A1" office:value-type="string">
            <text:p text:style-name="P45"/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2"/>e1 = (A, B) <text:s text:c="3"/>e2 = (A, C) <text:s text:c="3"/>e3 = (B, C)</text:span></text:p>
          </table:table-cell>
        </table:table-row>
        <table:table-row table:style-name="表格46.1">
          <table:table-cell table:style-name="表格46.A1" office:value-type="string">
            <text:p text:style-name="P45"/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2"/>每個節點長這樣（先不管後兩格）：</text:span></text:p>
          </table:table-cell>
        </table:table-row>
        <table:table-row table:style-name="表格46.1">
          <table:table-cell table:style-name="表格46.A1" office:value-type="string">
            <text:p text:style-name="P45"/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2"/>e1: ┌──────┬──────┬───┬───┐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│ V1=A │ V2=B │ ? │ ? │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└──────┴──────┴───┴───┘</text:span></text:p>
          </table:table-cell>
        </table:table-row>
        <table:table-row table:style-name="表格46.1">
          <table:table-cell table:style-name="表格46.A1" office:value-type="string">
            <text:p text:style-name="P45"/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2"/>e2: ┌──────┬──────┬───┬───┐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│ V1=A │ V2=C │ ? │ ? │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└──────┴──────┴───┴───┘</text:span></text:p>
          </table:table-cell>
        </table:table-row>
        <table:table-row table:style-name="表格46.1">
          <table:table-cell table:style-name="表格46.A1" office:value-type="string">
            <text:p text:style-name="P45"/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2"/>e3: ┌──────┬──────┬───┬───┐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│ V1=B │ V2=C │ ? │ ? │</text:span></text:p>
          </table:table-cell>
        </table:table-row>
        <table:table-row table:style-name="表格46.1">
          <table:table-cell table:style-name="表格46.A1" office:value-type="string">
            <text:p text:style-name="P45"><text:span text:style-name="T3"><text:s text:c="6"/>└──────┴──────┴───┴───┘</text:span></text:p>
          </table:table-cell>
        </table:table-row>
      </table:table>
      <text:p text:style-name="P43"/>
      <text:p text:style-name="P44"><text:span text:style-name="T1"><text:s text:c="2"/>▎ 第五步：為什麼需要 link1 和 link2？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5"><text:span text:style-name="T3"><text:s text:c="2"/>問題：每個頂點可能有很多條邊，它怎麼找到自己的所有邊？</text:span></text:p>
          </table:table-cell>
        </table:table-row>
        <table:table-row table:style-name="表格47.1">
          <table:table-cell table:style-name="表格47.A1" office:value-type="string">
            <text:p text:style-name="P45"/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以 A 為例：A 有兩條邊，e1=(A,B) 和 e2=(A,C)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A 需要從 e1 繼續找到 e2，才能知道自己所有的邊。</text:span></text:p>
          </table:table-cell>
        </table:table-row>
        <table:table-row table:style-name="表格47.1">
          <table:table-cell table:style-name="表格47.A1" office:value-type="string">
            <text:p text:style-name="P45"/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以 B 為例：B 也有兩條邊，e1=(A,B) 和 e3=(B,C)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B 需要從 e1 繼續找到 e3。</text:span></text:p>
          </table:table-cell>
        </table:table-row>
        <text:soft-page-break/>
        <table:table-row table:style-name="表格47.1">
          <table:table-cell table:style-name="表格47.A1" office:value-type="string">
            <text:p text:style-name="P45"/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但是 A 的下一條是 e2，B 的下一條是 e3，兩個人不一樣！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同一個 e1 節點，要同時記錄這兩條不同的路線。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2"/>→ 所以 e1 裡面需要兩個指標：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6"/>link1：給 V1（也就是 A）用，記錄「A 的下一條邊」</text:span></text:p>
          </table:table-cell>
        </table:table-row>
        <table:table-row table:style-name="表格47.1">
          <table:table-cell table:style-name="表格47.A1" office:value-type="string">
            <text:p text:style-name="P45"><text:span text:style-name="T3"><text:s text:c="6"/>link2：給 V2（也就是 B）用，記錄「B 的下一條邊」</text:span></text:p>
          </table:table-cell>
        </table:table-row>
      </table:table>
      <text:p text:style-name="P43"/>
      <text:p text:style-name="P44"><text:span text:style-name="T1"><text:s text:c="2"/>▎ 第六步：把 link1 / link2 填入記憶體方塊</text:span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5"><text:span text:style-name="T3"><text:s text:c="2"/>【站在 A 的角度】 A 的邊：e1=(A,B) → e2=(A,C) → 結束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1 中，A 是 V1，所以用 link1 記下一條：link1 = e2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2 中，A 是 V1，A 沒有下一條邊了： <text:s/>link1 = NULL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【站在 B 的角度】 B 的邊：e1=(A,B) → e3=(B,C) → 結束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1 中，B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3 中，B 是 V1，B 沒有下一條邊了： <text:s/>link1 = NULL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【站在 C 的角度】 C 的邊：e2=(A,C) → e3=(B,C) → 結束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2 中，C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4"/>在 e3 中，C 是 V2，C 沒有下一條邊了： <text:s/>link2 = NULL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填完之後，完整的記憶體方塊如下：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e1: ┌──────┬──────┬──────────┬──────────┐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│ V1=A │ V2=B │ link1=e2 │ link2=e3 │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└──────┴──────┴──────────┴──────────┘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2"/>↑A的下一條 <text:s/>↑B的下一條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e2: ┌──────┬──────┬────────────┬──────────┐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│ V1=A │ V2=C │ link1=NULL │ link2=e3 │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└──────┴──────┴────────────┴──────────┘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2"/>↑A已沒有邊 <text:s text:c="2"/>↑C的下一條</text:span></text:p>
          </table:table-cell>
        </table:table-row>
        <table:table-row table:style-name="表格48.1">
          <table:table-cell table:style-name="表格48.A1" office:value-type="string">
            <text:p text:style-name="P45"/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"/>e3: ┌──────┬──────┬────────────┬────────────┐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│ V1=B │ V2=C │ link1=NULL │ link2=NULL │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6"/>└──────┴──────┴────────────┴────────────┘</text:span></text:p>
          </table:table-cell>
        </table:table-row>
        <table:table-row table:style-name="表格48.1">
          <table:table-cell table:style-name="表格48.A1" office:value-type="string">
            <text:p text:style-name="P45"><text:span text:style-name="T3"><text:s text:c="22"/>↑B已沒有邊 <text:s text:c="2"/>↑C已沒有邊</text:span></text:p>
          </table:table-cell>
        </table:table-row>
      </table:table>
      <text:p text:style-name="P43"/>
      <text:p text:style-name="P44"><text:span text:style-name="T1"><text:s text:c="2"/>▎ 第七步：走訪各頂點所有邊（逐步追蹤）</text:span></text:p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5"><text:span text:style-name="T3"><text:s text:c="2"/>頂點起始指標（每個頂點記錄「第一條邊」是誰）：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A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B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C 的第一條邊 → e2</text:span></text:p>
          </table:table-cell>
        </table:table-row>
        <table:table-row table:style-name="表格49.1">
          <table:table-cell table:style-name="表格49.A1" office:value-type="string">
            <text:p text:style-name="P45"/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2"/>走訪 A 的所有邊：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① 從 A 的起始指標出發 → e1=(A,B)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7"/>A 是 e1 的 V1，所以走 link1 → e2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② 到達 e2=(A,C)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7"/>A 是 e2 的 V1，所以走 link1 → NULL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③ 遇到 NULL，結束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結果：A 的邊 = (A,B) 和 (A,C) <text:s/>✓</text:span></text:p>
          </table:table-cell>
        </table:table-row>
        <table:table-row table:style-name="表格49.1">
          <table:table-cell table:style-name="表格49.A1" office:value-type="string">
            <text:p text:style-name="P45"/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2"/>走訪 B 的所有邊：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① 從 B 的起始指標出發 → e1=(A,B)</text:span></text:p>
          </table:table-cell>
        </table:table-row>
        <text:soft-page-break/>
        <table:table-row table:style-name="表格49.1">
          <table:table-cell table:style-name="表格49.A1" office:value-type="string">
            <text:p text:style-name="P45"><text:span text:style-name="T3"><text:s text:c="7"/>B 是 e1 的 V2，所以走 link2 → e3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② 到達 e3=(B,C)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7"/>B 是 e3 的 V1，所以走 link1 → NULL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③ 遇到 NULL，結束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結果：B 的邊 = (A,B) 和 (B,C) <text:s/>✓</text:span></text:p>
          </table:table-cell>
        </table:table-row>
        <table:table-row table:style-name="表格49.1">
          <table:table-cell table:style-name="表格49.A1" office:value-type="string">
            <text:p text:style-name="P45"/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2"/>走訪 C 的所有邊：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① 從 C 的起始指標出發 → e2=(A,C)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7"/>C 是 e2 的 V2，所以走 link2 → e3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② 到達 e3=(B,C)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7"/>C 是 e3 的 V2，所以走 link2 → NULL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③ 遇到 NULL，結束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4"/>結果：C 的邊 = (A,C) 和 (B,C) <text:s/>✓</text:span></text:p>
          </table:table-cell>
        </table:table-row>
        <table:table-row table:style-name="表格49.1">
          <table:table-cell table:style-name="表格49.A1" office:value-type="string">
            <text:p text:style-name="P45"/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2"/>關鍵：e1、e2、e3 每個只有一份！A/B/C 各自沿著自己的路線</text:span></text:p>
          </table:table-cell>
        </table:table-row>
        <table:table-row table:style-name="表格49.1">
          <table:table-cell table:style-name="表格49.A1" office:value-type="string">
            <text:p text:style-name="P45"><text:span text:style-name="T3"><text:s text:c="2"/>（link1 或 link2）走，互不干擾，卻共用同一批節點。</text:span></text:p>
          </table:table-cell>
        </table:table-row>
      </table:table>
      <text:p text:style-name="P43"/>
      <text:p text:style-name="P44"><text:span text:style-name="T1"><text:s text:c="2"/>▎ 考試申論題標準答案：為什麼 Edge 節點需要 link1 和 link2？</text:span></text:p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5"><text:span text:style-name="T3"><text:s text:c="2"/>因為一條邊同時連接兩個頂點 V1 和 V2。</text:span></text:p>
          </table:table-cell>
        </table:table-row>
        <table:table-row table:style-name="表格50.1">
          <table:table-cell table:style-name="表格50.A1" office:value-type="string">
            <text:p text:style-name="P45"><text:span text:style-name="T3"><text:s text:c="2"/>當從 V1 端走訪其所有邊時，需要 link1 指向 V1 的下一條邊；</text:span></text:p>
          </table:table-cell>
        </table:table-row>
        <table:table-row table:style-name="表格50.1">
          <table:table-cell table:style-name="表格50.A1" office:value-type="string">
            <text:p text:style-name="P45"><text:span text:style-name="T3"><text:s text:c="2"/>當從 V2 端走訪其所有邊時，需要 link2 指向 V2 的下一條邊。</text:span></text:p>
          </table:table-cell>
        </table:table-row>
        <table:table-row table:style-name="表格50.1">
          <table:table-cell table:style-name="表格50.A1" office:value-type="string">
            <text:p text:style-name="P45"><text:span text:style-name="T3"><text:s text:c="2"/>兩端的「下一條邊」通常是不同的邊節點，</text:span></text:p>
          </table:table-cell>
        </table:table-row>
        <table:table-row table:style-name="表格50.1">
          <table:table-cell table:style-name="表格50.A1" office:value-type="string">
            <text:p text:style-name="P45"><text:span text:style-name="T3"><text:s text:c="2"/>因此 Edge 節點必須同時保存 link1 與 link2 兩個鏈結指標。</text:span></text:p>
          </table:table-cell>
        </table:table-row>
      </table:table>
      <text:p text:style-name="P43"/>
      <text:p text:style-name="P44"><text:span text:style-name="T1"><text:s text:c="2"/>▎ Degree 計算時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5"><text:span text:style-name="T3"><text:s text:c="2"/>計算「所有頂點的 Degree」：</text:span></text:p>
          </table:table-cell>
        </table:table-row>
        <table:table-row table:style-name="表格51.1">
          <table:table-cell table:style-name="表格51.A1" office:value-type="string">
            <text:p text:style-name="P45"/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2"/>Matrix 做法：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掃描整張 n×n 矩陣 → 看每個格子是不是 0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需要看 n² 個格子 → O(n²)</text:span></text:p>
          </table:table-cell>
        </table:table-row>
        <table:table-row table:style-name="表格51.1">
          <table:table-cell table:style-name="表格51.A1" office:value-type="string">
            <text:p text:style-name="P45"/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2"/>Multilist 做法：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走訪 n 個頂點的起始指標 <text:s text:c="4"/>→ n 步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走訪 e 個邊節點（每個走兩次）→ 2e 步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總計 n + 2e = O(n+e)</text:span></text:p>
          </table:table-cell>
        </table:table-row>
        <table:table-row table:style-name="表格51.1">
          <table:table-cell table:style-name="表格51.A1" office:value-type="string">
            <text:p text:style-name="P45"/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2"/>範例（n=10000，e=20）：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Matrix <text:s text:c="2"/>→ 100,000,000 步</text:span></text:p>
          </table:table-cell>
        </table:table-row>
        <table:table-row table:style-name="表格51.1">
          <table:table-cell table:style-name="表格51.A1" office:value-type="string">
            <text:p text:style-name="P45"><text:span text:style-name="T3"><text:s text:c="4"/>Multilist → <text:s text:c="5"/>10,040 步 <text:s/>（快 10000 倍！）</text:span></text:p>
          </table:table-cell>
        </table:table-row>
      </table:table>
      <text:h text:style-name="P39" text:outline-level="2">2-4 三種表示法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27">比較項目</text:p>
          </table:table-cell>
          <table:table-cell table:style-name="表格13.A1" office:value-type="string">
            <text:p text:style-name="P28">Adjacency Matrix</text:p>
          </table:table-cell>
          <table:table-cell table:style-name="表格13.A1" office:value-type="string">
            <text:p text:style-name="P28">Adjacency List</text:p>
          </table:table-cell>
          <table:table-cell table:style-name="表格13.A1" office:value-type="string">
            <text:p text:style-name="P28">Adjacency Multilist</text:p>
          </table:table-cell>
          <table:table-cell table:style-name="表格13.A1" office:value-type="string">
            <text:p text:style-name="P27">備註</text:p>
          </table:table-cell>
        </table:table-row>
        <table:table-row table:style-name="表格13.1">
          <table:table-cell table:style-name="表格13.A2" office:value-type="string">
            <text:p text:style-name="P21">空間複雜度</text:p>
          </table:table-cell>
          <table:table-cell table:style-name="表格13.B2" office:value-type="string">
            <text:p text:style-name="P30">O(V²)</text:p>
          </table:table-cell>
          <table:table-cell table:style-name="表格13.C2" office:value-type="string">
            <text:p text:style-name="P32">O(V+E)</text:p>
          </table:table-cell>
          <table:table-cell table:style-name="表格13.C2" office:value-type="string">
            <text:p text:style-name="P32">O(V+E)</text:p>
          </table:table-cell>
          <table:table-cell table:style-name="表格13.E2" office:value-type="string">
            <text:p text:style-name="P19">稀疏圖用 List/Multilist</text:p>
          </table:table-cell>
        </table:table-row>
        <table:table-row table:style-name="表格13.1">
          <table:table-cell table:style-name="表格13.E2" office:value-type="string">
            <text:p text:style-name="P21">查邊速度</text:p>
          </table:table-cell>
          <table:table-cell table:style-name="表格13.C2" office:value-type="string">
            <text:p text:style-name="P32">O(1)</text:p>
          </table:table-cell>
          <table:table-cell table:style-name="表格13.B2" office:value-type="string">
            <text:p text:style-name="P30">O(degree)</text:p>
          </table:table-cell>
          <table:table-cell table:style-name="表格13.B2" office:value-type="string">
            <text:p text:style-name="P30">O(degree)</text:p>
          </table:table-cell>
          <table:table-cell table:style-name="表格13.E2" office:value-type="string">
            <text:p text:style-name="P19">查詢快 → 選矩陣</text:p>
          </table:table-cell>
        </table:table-row>
        <table:table-row table:style-name="表格13.1">
          <table:table-cell table:style-name="表格13.A2" office:value-type="string">
            <text:p text:style-name="P21">計算全部 Degree</text:p>
          </table:table-cell>
          <table:table-cell table:style-name="表格13.B2" office:value-type="string">
            <text:p text:style-name="P30">O(n²)</text:p>
          </table:table-cell>
          <table:table-cell table:style-name="表格13.C2" office:value-type="string">
            <text:p text:style-name="P32">O(n+e)</text:p>
          </table:table-cell>
          <table:table-cell table:style-name="表格13.C2" office:value-type="string">
            <text:p text:style-name="P32">O(n+e)</text:p>
          </table:table-cell>
          <table:table-cell table:style-name="表格13.A2" office:value-type="string">
            <text:p text:style-name="P19">Multilist 不掃空格</text:p>
          </table:table-cell>
        </table:table-row>
        <table:table-row table:style-name="表格13.1">
          <table:table-cell table:style-name="表格13.E2" office:value-type="string">
            <text:p text:style-name="P21">邊的儲存次數</text:p>
          </table:table-cell>
          <table:table-cell table:style-name="表格13.E2" office:value-type="string">
            <text:p text:style-name="P20">1次/格</text:p>
          </table:table-cell>
          <table:table-cell table:style-name="表格13.B2" office:value-type="string">
            <text:p text:style-name="P31">存兩次（無向）</text:p>
          </table:table-cell>
          <table:table-cell table:style-name="表格13.C2" office:value-type="string">
            <text:p text:style-name="P32">只存一次 ✓</text:p>
          </table:table-cell>
          <table:table-cell table:style-name="表格13.E2" office:value-type="string">
            <text:p text:style-name="P19">Multilist 最省</text:p>
          </table:table-cell>
        </table:table-row>
        <table:table-row table:style-name="表格13.1">
          <table:table-cell table:style-name="表格13.A2" office:value-type="string">
            <text:p text:style-name="P21">適合圖形</text:p>
          </table:table-cell>
          <table:table-cell table:style-name="表格13.B6" office:value-type="string">
            <text:p text:style-name="P11">Dense（稠密）</text:p>
          </table:table-cell>
          <table:table-cell table:style-name="表格13.C6" office:value-type="string">
            <text:p text:style-name="P13">Sparse（稀疏）</text:p>
          </table:table-cell>
          <table:table-cell table:style-name="表格13.C6" office:value-type="string">
            <text:p text:style-name="P13">Sparse（稀疏）</text:p>
          </table:table-cell>
          <table:table-cell table:style-name="表格13.A2" office:value-type="string">
            <text:p text:style-name="P3"/>
          </table:table-cell>
        </table:table-row>
      </table:table>
      <text:p text:style-name="Standard"/>
      <text:h text:style-name="P5" text:outline-level="1">三、BFS（廣度優先搜尋）─ 含完整圖解</text:h>
      <text:p text:style-name="P18">Breadth-First Search｜使用 Queue（FIFO 佇列）</text:p>
      <text:p text:style-name="P1"/>
      <text:h text:style-name="P4" text:outline-level="2">3-1 核心概念圖解</text:h>
      <text:p text:style-name="P8"><text:s text:c="2"/>▎ 為什麼叫「廣度」優先？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<text:s text:c="2"/>圖形（樹狀）：</text:p>
          </table:table-cell>
        </table:table-row>
        <table:table-row table:style-name="表格14.1">
          <table:table-cell table:style-name="表格14.A1" office:value-type="string">
            <text:p text:style-name="P26"><text:s text:c="19"/>A <text:s text:c="9"/>← 第 0 層</text:p>
          </table:table-cell>
        </table:table-row>
        <table:table-row table:style-name="表格14.1">
          <table:table-cell table:style-name="表格14.A1" office:value-type="string">
            <text:p text:style-name="P26"><text:s text:c="17"/>/ <text:s text:c="2"/>\</text:p>
          </table:table-cell>
        </table:table-row>
        <table:table-row table:style-name="表格14.1">
          <table:table-cell table:style-name="表格14.A1" office:value-type="string">
            <text:p text:style-name="P26"><text:s text:c="15"/>B <text:s text:c="6"/>C <text:s text:c="5"/>← 第 1 層</text:p>
          </table:table-cell>
        </table:table-row>
        <table:table-row table:style-name="表格14.1">
          <table:table-cell table:style-name="表格14.A1" office:value-type="string">
            <text:p text:style-name="P26"><text:s text:c="14"/>/ \ <text:s text:c="4"/>/ \</text:p>
          </table:table-cell>
        </table:table-row>
        <table:table-row table:style-name="表格14.1">
          <table:table-cell table:style-name="表格14.A1" office:value-type="string">
            <text:p text:style-name="P26"><text:s text:c="13"/>D <text:s text:c="2"/>E <text:s text:c="2"/>F <text:s text:c="2"/>G <text:s text:c="3"/>← 第 2 層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6"><text:s text:c="2"/>BFS 從 A 出發，一層一層往外走：</text:p>
          </table:table-cell>
        </table:table-row>
        <table:table-row table:style-name="表格14.1">
          <table:table-cell table:style-name="表格14.A1" office:value-type="string">
            <text:p text:style-name="P26"><text:s text:c="2"/>第 0 層：拜訪 A</text:p>
          </table:table-cell>
        </table:table-row>
        <table:table-row table:style-name="表格14.1">
          <table:table-cell table:style-name="表格14.A1" office:value-type="string">
            <text:p text:style-name="P26"><text:s text:c="2"/>第 1 層：拜訪 B、C（A 的鄰居全部先拜訪完）</text:p>
          </table:table-cell>
        </table:table-row>
        <table:table-row table:style-name="表格14.1">
          <table:table-cell table:style-name="表格14.A1" office:value-type="string">
            <text:p text:style-name="P26"><text:s text:c="2"/>第 2 層：拜訪 D、E、F、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6"><text:s text:c="2"/>輸出順序：A → B → C → D → E → F → 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6"><text:s text:c="2"/>比喻：水面漣漪，從中心一圈一圈向外擴散</text:p>
          </table:table-cell>
        </table:table-row>
      </table:table>
      <text:p text:style-name="P1"/>
      <text:h text:style-name="P4" text:outline-level="2">3-2 BFS 逐步追蹤（詳細步驟）</text:h>
      <text:p text:style-name="P8"><text:s text:c="2"/>▎ 使用的圖形：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<text:s text:c="6"/>A ── B ── D</text:p>
          </table:table-cell>
        </table:table-row>
        <table:table-row table:style-name="表格15.1">
          <table:table-cell table:style-name="表格15.A1" office:value-type="string">
            <text:p text:style-name="P26"><text:s text:c="6"/>| <text:s text:c="8"/></text:p>
          </table:table-cell>
        </table:table-row>
        <table:table-row table:style-name="表格15.1">
          <table:table-cell table:style-name="表格15.A1" office:value-type="string">
            <text:p text:style-name="P26"><text:s text:c="6"/>C ── E <text:s text:c="2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6"><text:s text:c="2"/>邊：A-B <text:s/>A-C <text:s/>B-D <text:s/>C-E</text:p>
          </table:table-cell>
        </table:table-row>
        <table:table-row table:style-name="表格15.1">
          <table:table-cell table:style-name="表格15.A1" office:value-type="string">
            <text:p text:style-name="P26"><text:s text:c="2"/>從 A 開始 BFS</text:p>
          </table:table-cell>
        </table:table-row>
      </table:table>
      <text:p text:style-name="P1"/>
      <text:p text:style-name="P8"><text:s text:c="2"/>▎ 每一步驟狀態追蹤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 table:number-columns-repeated="2"/>
        <table:table-row table:style-name="表格16.1">
          <table:table-cell table:style-name="表格16.A1" office:value-type="string">
            <text:p text:style-name="P28">步</text:p>
          </table:table-cell>
          <table:table-cell table:style-name="表格16.A1" office:value-type="string">
            <text:p text:style-name="P27">動作</text:p>
          </table:table-cell>
          <table:table-cell table:style-name="表格16.A1" office:value-type="string">
            <text:p text:style-name="P28">Queue 狀態（左=隊首）</text:p>
          </table:table-cell>
          <table:table-cell table:style-name="表格16.A1" office:value-type="string">
            <text:p text:style-name="P28">已拜訪</text:p>
          </table:table-cell>
          <table:table-cell table:style-name="表格16.A1" office:value-type="string">
            <text:p text:style-name="P28">輸出</text:p>
          </table:table-cell>
        </table:table-row>
        <table:table-row table:style-name="表格16.1">
          <table:table-cell table:style-name="表格16.A2" office:value-type="string">
            <text:p text:style-name="P14">初始</text:p>
          </table:table-cell>
          <table:table-cell table:style-name="表格16.A2" office:value-type="string">
            <text:p text:style-name="P19">push 起點 A，加入已拜訪</text:p>
          </table:table-cell>
          <table:table-cell table:style-name="表格16.A2" office:value-type="string">
            <text:p text:style-name="P23">[ A ]</text:p>
          </table:table-cell>
          <table:table-cell table:style-name="表格16.A2" office:value-type="string">
            <text:p text:style-name="P20">{A}</text:p>
          </table:table-cell>
          <table:table-cell table:style-name="表格16.A2" office:value-type="string">
            <text:p text:style-name="P20">（空）</text:p>
          </table:table-cell>
        </table:table-row>
        <table:table-row table:style-name="表格16.1">
          <table:table-cell table:style-name="表格16.A3" office:value-type="string">
            <text:p text:style-name="P14">①</text:p>
          </table:table-cell>
          <table:table-cell table:style-name="表格16.A3" office:value-type="string">
            <text:p text:style-name="P19">dequeue A → 輸出 A 將鄰居 B、C 加入</text:p>
          </table:table-cell>
          <table:table-cell table:style-name="表格16.A3" office:value-type="string">
            <text:p text:style-name="P23">[ B, C ]</text:p>
          </table:table-cell>
          <table:table-cell table:style-name="表格16.A3" office:value-type="string">
            <text:p text:style-name="P20">{A,B,C}</text:p>
          </table:table-cell>
          <table:table-cell table:style-name="表格16.A3" office:value-type="string">
            <text:p text:style-name="P20">A</text:p>
          </table:table-cell>
        </table:table-row>
        <table:table-row table:style-name="表格16.1">
          <table:table-cell table:style-name="表格16.A2" office:value-type="string">
            <text:p text:style-name="P14">②</text:p>
          </table:table-cell>
          <table:table-cell table:style-name="表格16.A2" office:value-type="string">
            <text:p text:style-name="P19">dequeue B → 輸出 B 將鄰居 D 加入（A 已拜訪跳過）</text:p>
          </table:table-cell>
          <table:table-cell table:style-name="表格16.A2" office:value-type="string">
            <text:p text:style-name="P23">[ C, D ]</text:p>
          </table:table-cell>
          <table:table-cell table:style-name="表格16.A2" office:value-type="string">
            <text:p text:style-name="P20">{A,B,C,D}</text:p>
          </table:table-cell>
          <table:table-cell table:style-name="表格16.A2" office:value-type="string">
            <text:p text:style-name="P20">A B</text:p>
          </table:table-cell>
        </table:table-row>
        <table:table-row table:style-name="表格16.1">
          <table:table-cell table:style-name="表格16.A3" office:value-type="string">
            <text:p text:style-name="P14">③</text:p>
          </table:table-cell>
          <table:table-cell table:style-name="表格16.A3" office:value-type="string">
            <text:p text:style-name="P19">dequeue C → 輸出 C 將鄰居 E 加入（A 已拜訪跳過）</text:p>
          </table:table-cell>
          <table:table-cell table:style-name="表格16.A3" office:value-type="string">
            <text:p text:style-name="P23">[ D, E ]</text:p>
          </table:table-cell>
          <table:table-cell table:style-name="表格16.A3" office:value-type="string">
            <text:p text:style-name="P20">{A,B,C,D,E}</text:p>
          </table:table-cell>
          <table:table-cell table:style-name="表格16.A3" office:value-type="string">
            <text:p text:style-name="P20">A B C</text:p>
          </table:table-cell>
        </table:table-row>
        <table:table-row table:style-name="表格16.1">
          <table:table-cell table:style-name="表格16.A2" office:value-type="string">
            <text:p text:style-name="P14">④</text:p>
          </table:table-cell>
          <table:table-cell table:style-name="表格16.A2" office:value-type="string">
            <text:p text:style-name="P19">dequeue D → 輸出 D 無未拜訪鄰居</text:p>
          </table:table-cell>
          <table:table-cell table:style-name="表格16.A2" office:value-type="string">
            <text:p text:style-name="P23">[ E ]</text:p>
          </table:table-cell>
          <table:table-cell table:style-name="表格16.A2" office:value-type="string">
            <text:p text:style-name="P20">{A,B,C,D,E}</text:p>
          </table:table-cell>
          <table:table-cell table:style-name="表格16.A2" office:value-type="string">
            <text:p text:style-name="P20">A B C D</text:p>
          </table:table-cell>
        </table:table-row>
        <table:table-row table:style-name="表格16.1">
          <table:table-cell table:style-name="表格16.A3" office:value-type="string">
            <text:p text:style-name="P14">⑤</text:p>
          </table:table-cell>
          <table:table-cell table:style-name="表格16.A3" office:value-type="string">
            <text:p text:style-name="P19">dequeue E → 輸出 E 無未拜訪鄰居</text:p>
          </table:table-cell>
          <table:table-cell table:style-name="表格16.A3" office:value-type="string">
            <text:p text:style-name="P23">[ ]（空）</text:p>
          </table:table-cell>
          <table:table-cell table:style-name="表格16.A3" office:value-type="string">
            <text:p text:style-name="P20">{A,B,C,D,E}</text:p>
          </table:table-cell>
          <table:table-cell table:style-name="表格16.A3" office:value-type="string">
            <text:p text:style-name="P32">A B C D E</text:p>
          </table:table-cell>
        </table:table-row>
      </table:table>
      <text:p text:style-name="P1"/>
      <text:p text:style-name="P8"><text:s text:c="2"/>▎ 為什麼 Queue 能保證「層次」順序？</text:p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26"><text:s text:c="2"/>FIFO（先進先出）的特性：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6"><text:s text:c="2"/>第 1 層的 B、C 先進 Queue</text:p>
          </table:table-cell>
        </table:table-row>
        <table:table-row table:style-name="表格17.1">
          <table:table-cell table:style-name="表格17.A1" office:value-type="string">
            <text:p text:style-name="P26"><text:s text:c="2"/>第 2 層的 D、E 後進 Queue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6"><text:s text:c="2"/>Queue: [ B, C, D, E ]</text:p>
          </table:table-cell>
        </table:table-row>
        <table:table-row table:style-name="表格17.1">
          <table:table-cell table:style-name="表格17.A1" office:value-type="string">
            <text:p text:style-name="P26"><text:s text:c="11"/>↑ <text:s text:c="10"/>← dequeue 從這端取出</text:p>
          </table:table-cell>
        </table:table-row>
        <table:table-row table:style-name="表格17.1">
          <table:table-cell table:style-name="表格17.A1" office:value-type="string">
            <text:p text:style-name="P26"><text:s text:c="9"/>B 先出 → C 先出 → D 先出 → E 先出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6"><text:s text:c="2"/>B、C（第 1 層）一定比 D、E（第 2 層）先被取出</text:p>
          </table:table-cell>
        </table:table-row>
        <table:table-row table:style-name="表格17.1">
          <table:table-cell table:style-name="表格17.A1" office:value-type="string">
            <text:p text:style-name="P26"><text:s text:c="2"/>→ 保證層次順序！這就是「廣度優先」的核心</text:p>
          </table:table-cell>
        </table:table-row>
      </table:table>
      <text:p text:style-name="P1"/>
      <text:h text:style-name="P4" text:outline-level="2">3-3 BFS 時間與空間複雜度推導</text:h>
      <text:p text:style-name="P8"><text:s text:c="2"/>▎ 時間複雜度：O(V + E)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6"><text:s text:c="2"/>每個頂點最多被 enqueue / dequeue 一次 <text:s/>→ O(V)</text:p>
          </table:table-cell>
        </table:table-row>
        <table:table-row table:style-name="表格18.1">
          <table:table-cell table:style-name="表格18.A1" office:value-type="string">
            <text:p text:style-name="P26"><text:s text:c="2"/>每條邊在處理時最多被檢查兩次（兩端各一）→ O(E)</text:p>
          </table:table-cell>
        </table:table-row>
        <table:table-row table:style-name="表格18.1">
          <table:table-cell table:style-name="表格18.A1" office:value-type="string">
            <text:p text:style-name="P26"><text:s text:c="2"/>總計：O(V) + O(E) = O(V + E)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6"><text:s text:c="2"/>範例：V=5，E=4</text:p>
          </table:table-cell>
        </table:table-row>
        <table:table-row table:style-name="表格18.1">
          <table:table-cell table:style-name="表格18.A1" office:value-type="string">
            <text:p text:style-name="P26"><text:s text:c="2"/>步驟數 ≈ 5 + 4 = 9 步（非常有效率）</text:p>
          </table:table-cell>
        </table:table-row>
      </table:table>
      <text:p text:style-name="P8"><text:s text:c="2"/>▎ 空間複雜度：O(V)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2"/>Queue 最多同時放幾個頂點？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6"><text:s text:c="2"/>最壞情況：一個頂點的所有鄰居同時在 Queue 裡</text:p>
          </table:table-cell>
        </table:table-row>
        <table:table-row table:style-name="表格19.1">
          <table:table-cell table:style-name="表格19.A1" office:value-type="string">
            <text:p text:style-name="P26"><text:s text:c="2"/>可能多達 V-1 個 → 空間 O(V)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6"><text:s text:c="2"/>另需 visited 陣列記錄已拜訪 → O(V)</text:p>
          </table:table-cell>
        </table:table-row>
        <table:table-row table:style-name="表格19.1">
          <table:table-cell table:style-name="表格19.A1" office:value-type="string">
            <text:p text:style-name="P26"><text:s text:c="2"/>總空間：O(V)</text:p>
          </table:table-cell>
        </table:table-row>
      </table:table>
      <text:p text:style-name="Standard"/>
      <text:h text:style-name="P5" text:outline-level="1">四、DFS（深度優先搜尋）─ 含完整圖解</text:h>
      <text:p text:style-name="P18">Depth-First Search｜使用 Stack（LIFO 堆疊）</text:p>
      <text:p text:style-name="P1"/>
      <text:h text:style-name="P4" text:outline-level="2">4-1 核心概念圖解</text:h>
      <text:p text:style-name="P8"><text:s text:c="2"/>▎ 為什麼叫「深度」優先？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6"><text:s text:c="2"/>同一張圖：</text:p>
          </table:table-cell>
        </table:table-row>
        <table:table-row table:style-name="表格20.1">
          <table:table-cell table:style-name="表格20.A1" office:value-type="string">
            <text:p text:style-name="P26"><text:s text:c="19"/>A</text:p>
          </table:table-cell>
        </table:table-row>
        <table:table-row table:style-name="表格20.1">
          <table:table-cell table:style-name="表格20.A1" office:value-type="string">
            <text:p text:style-name="P26"><text:s text:c="17"/>/ <text:s text:c="2"/>\</text:p>
          </table:table-cell>
        </table:table-row>
        <table:table-row table:style-name="表格20.1">
          <table:table-cell table:style-name="表格20.A1" office:value-type="string">
            <text:p text:style-name="P26"><text:s text:c="15"/>B <text:s text:c="6"/>C</text:p>
          </table:table-cell>
        </table:table-row>
        <table:table-row table:style-name="表格20.1">
          <table:table-cell table:style-name="表格20.A1" office:value-type="string">
            <text:p text:style-name="P26"><text:s text:c="14"/>/ \</text:p>
          </table:table-cell>
        </table:table-row>
        <table:table-row table:style-name="表格20.1">
          <table:table-cell table:style-name="表格20.A1" office:value-type="string">
            <text:p text:style-name="P26"><text:s text:c="13"/>D <text:s text:c="2"/>E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6"><text:s text:c="2"/>DFS 從 A 出發，先一路衝到底：</text:p>
          </table:table-cell>
        </table:table-row>
        <table:table-row table:style-name="表格20.1">
          <table:table-cell table:style-name="表格20.A1" office:value-type="string">
            <text:p text:style-name="P26"><text:s text:c="2"/>A → B（往深處走）→ D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6"><text:s text:c="2"/>→ E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6"><text:s text:c="2"/>→ 退回 A → C（A 的另一個鄰居）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6"><text:s text:c="2"/>輸出順序：A → B → D → E → C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6"><text:s text:c="2"/>比喻：走迷宮，一條路走到底，死路才退回</text:p>
          </table:table-cell>
        </table:table-row>
      </table:table>
      <text:p text:style-name="P1"/>
      <text:h text:style-name="P4" text:outline-level="2">4-2 DFS 逐步追蹤（用 Stack 詳細步驟）</text:h>
      <text:p text:style-name="P8"><text:s text:c="2"/>▎ 使用相同圖形，從 A 開始 DFS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28">步</text:p>
          </table:table-cell>
          <table:table-cell table:style-name="表格21.A1" office:value-type="string">
            <text:p text:style-name="P27">動作</text:p>
          </table:table-cell>
          <table:table-cell table:style-name="表格21.A1" office:value-type="string">
            <text:p text:style-name="P28">Stack 狀態（右=頂端）</text:p>
          </table:table-cell>
          <table:table-cell table:style-name="表格21.A1" office:value-type="string">
            <text:p text:style-name="P28">已拜訪</text:p>
          </table:table-cell>
          <table:table-cell table:style-name="表格21.A1" office:value-type="string">
            <text:p text:style-name="P28">輸出</text:p>
          </table:table-cell>
        </table:table-row>
        <table:table-row table:style-name="表格21.1">
          <table:table-cell table:style-name="表格21.A2" office:value-type="string">
            <text:p text:style-name="P14">初始</text:p>
          </table:table-cell>
          <table:table-cell table:style-name="表格21.A2" office:value-type="string">
            <text:p text:style-name="P19">push 起點 A</text:p>
          </table:table-cell>
          <table:table-cell table:style-name="表格21.A2" office:value-type="string">
            <text:p text:style-name="P23">[ A ]</text:p>
          </table:table-cell>
          <table:table-cell table:style-name="表格21.A2" office:value-type="string">
            <text:p text:style-name="P20">{A}</text:p>
          </table:table-cell>
          <table:table-cell table:style-name="表格21.A2" office:value-type="string">
            <text:p text:style-name="P20">（空）</text:p>
          </table:table-cell>
        </table:table-row>
        <table:table-row table:style-name="表格21.1">
          <table:table-cell table:style-name="表格21.A3" office:value-type="string">
            <text:p text:style-name="P14">①</text:p>
          </table:table-cell>
          <table:table-cell table:style-name="表格21.A3" office:value-type="string">
            <text:p text:style-name="P19">pop A → 輸出 A push 鄰居 C、B（C先push → B後push，B先pop）</text:p>
          </table:table-cell>
          <table:table-cell table:style-name="表格21.A3" office:value-type="string">
            <text:p text:style-name="P23">[ C, B ] <text:s/>← B在頂</text:p>
          </table:table-cell>
          <table:table-cell table:style-name="表格21.A3" office:value-type="string">
            <text:p text:style-name="P20">{A,B,C}</text:p>
          </table:table-cell>
          <table:table-cell table:style-name="表格21.A3" office:value-type="string">
            <text:p text:style-name="P20">A</text:p>
          </table:table-cell>
        </table:table-row>
        <table:table-row table:style-name="表格21.1">
          <table:table-cell table:style-name="表格21.A2" office:value-type="string">
            <text:p text:style-name="P14">②</text:p>
          </table:table-cell>
          <table:table-cell table:style-name="表格21.A2" office:value-type="string">
            <text:p text:style-name="P19">pop B → 輸出 B push 鄰居 E、D（D在頂）</text:p>
          </table:table-cell>
          <table:table-cell table:style-name="表格21.A2" office:value-type="string">
            <text:p text:style-name="P23">[ C, E, D ] <text:s/>← D在頂</text:p>
          </table:table-cell>
          <table:table-cell table:style-name="表格21.A2" office:value-type="string">
            <text:p text:style-name="P20">{A,B,C,D,E}</text:p>
          </table:table-cell>
          <table:table-cell table:style-name="表格21.A2" office:value-type="string">
            <text:p text:style-name="P20">A B</text:p>
          </table:table-cell>
        </table:table-row>
        <table:table-row table:style-name="表格21.1">
          <table:table-cell table:style-name="表格21.A3" office:value-type="string">
            <text:p text:style-name="P14">③</text:p>
          </table:table-cell>
          <table:table-cell table:style-name="表格21.A3" office:value-type="string">
            <text:p text:style-name="P19">pop D → 輸出 D 無未拜訪鄰居</text:p>
          </table:table-cell>
          <table:table-cell table:style-name="表格21.A3" office:value-type="string">
            <text:p text:style-name="P23">[ C, E ] <text:s/>← E在頂</text:p>
          </table:table-cell>
          <table:table-cell table:style-name="表格21.A3" office:value-type="string">
            <text:p text:style-name="P20">{A,B,C,D,E}</text:p>
          </table:table-cell>
          <table:table-cell table:style-name="表格21.A3" office:value-type="string">
            <text:p text:style-name="P20">A B D</text:p>
          </table:table-cell>
        </table:table-row>
        <table:table-row table:style-name="表格21.1">
          <table:table-cell table:style-name="表格21.A2" office:value-type="string">
            <text:p text:style-name="P14">④</text:p>
          </table:table-cell>
          <table:table-cell table:style-name="表格21.A2" office:value-type="string">
            <text:p text:style-name="P19">pop E → 輸出 E 無未拜訪鄰居</text:p>
          </table:table-cell>
          <table:table-cell table:style-name="表格21.A2" office:value-type="string">
            <text:p text:style-name="P23">[ C ] <text:s/>← C在頂</text:p>
          </table:table-cell>
          <table:table-cell table:style-name="表格21.A2" office:value-type="string">
            <text:p text:style-name="P20">{A,B,C,D,E}</text:p>
          </table:table-cell>
          <table:table-cell table:style-name="表格21.A2" office:value-type="string">
            <text:p text:style-name="P20">A B D E</text:p>
          </table:table-cell>
        </table:table-row>
        <table:table-row table:style-name="表格21.1">
          <table:table-cell table:style-name="表格21.A3" office:value-type="string">
            <text:p text:style-name="P14">⑤</text:p>
          </table:table-cell>
          <table:table-cell table:style-name="表格21.A3" office:value-type="string">
            <text:p text:style-name="P19">pop C → 輸出 C 無未拜訪鄰居</text:p>
          </table:table-cell>
          <table:table-cell table:style-name="表格21.A3" office:value-type="string">
            <text:p text:style-name="P23">[ ]（空）</text:p>
          </table:table-cell>
          <table:table-cell table:style-name="表格21.A3" office:value-type="string">
            <text:p text:style-name="P20">{A,B,C,D,E}</text:p>
          </table:table-cell>
          <table:table-cell table:style-name="表格21.A3" office:value-type="string">
            <text:p text:style-name="P32">A B D E C</text:p>
          </table:table-cell>
        </table:table-row>
      </table:table>
      <text:p text:style-name="P1"/>
      <text:p text:style-name="P8"><text:s text:c="2"/>▎ 為什麼 Stack 能做到「深度優先」？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<text:s text:c="2"/>LIFO（後進先出）的特性：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6"><text:s text:c="2"/>從 A pop 出來後，push B 和 C</text:p>
          </table:table-cell>
        </table:table-row>
        <table:table-row table:style-name="表格22.1">
          <table:table-cell table:style-name="表格22.A1" office:value-type="string">
            <text:p text:style-name="P26"><text:s text:c="2"/>Stack: [ C, B ] <text:s/>← B 在頂端</text:p>
          </table:table-cell>
        </table:table-row>
        <table:table-row table:style-name="表格22.1">
          <table:table-cell table:style-name="表格22.A1" office:value-type="string">
            <text:p text:style-name="P26"><text:s text:c="2"/>下一步 pop 出 B（不是 C！）</text:p>
          </table:table-cell>
        </table:table-row>
        <table:table-row table:style-name="表格22.1">
          <table:table-cell table:style-name="表格22.A1" office:value-type="string">
            <text:p text:style-name="P26"><text:s text:c="2"/>→ 優先往 B 的方向深入，而非切換到 C</text:p>
          </table:table-cell>
        </table:table-row>
        <table:table-row table:style-name="表格22.1">
          <table:table-cell table:style-name="表格22.A1" office:value-type="string">
            <text:p text:style-name="P26"><text:s text:c="2"/>→ 這就是「深度優先」！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6"><text:s text:c="2"/>要等 B 這一支全部走完（pop 出 D、E）</text:p>
          </table:table-cell>
        </table:table-row>
        <table:table-row table:style-name="表格22.1">
          <table:table-cell table:style-name="表格22.A1" office:value-type="string">
            <text:p text:style-name="P26"><text:s text:c="2"/>Stack 才回到 C：[ C ]</text:p>
          </table:table-cell>
        </table:table-row>
        <table:table-row table:style-name="表格22.1">
          <table:table-cell table:style-name="表格22.A1" office:value-type="string">
            <text:p text:style-name="P26"><text:s text:c="2"/>→ 這就是「Backtracking（回溯）」</text:p>
          </table:table-cell>
        </table:table-row>
      </table:table>
      <text:p text:style-name="P1"/>
      <text:h text:style-name="P4" text:outline-level="2">4-3 DFS 時間與空間複雜度推導</text:h>
      <text:p text:style-name="P8"><text:s text:c="2"/>▎ 時間複雜度：O(V + E)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<text:s text:c="2"/>每個頂點最多被 push / pop 一次 <text:s/>→ O(V)</text:p>
          </table:table-cell>
        </table:table-row>
        <table:table-row table:style-name="表格23.1">
          <table:table-cell table:style-name="表格23.A1" office:value-type="string">
            <text:p text:style-name="P26"><text:s text:c="2"/>每條邊在處理時被檢查兩次 <text:s text:c="7"/>→ O(E)</text:p>
          </table:table-cell>
        </table:table-row>
        <table:table-row table:style-name="表格23.1">
          <table:table-cell table:style-name="表格23.A1" office:value-type="string">
            <text:p text:style-name="P26"><text:s text:c="2"/>總計：O(V + E) <text:s/>（和 BFS 相同）</text:p>
          </table:table-cell>
        </table:table-row>
      </table:table>
      <text:p text:style-name="P8"><text:s text:c="2"/>▎ 空間複雜度：O(V)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6"><text:s text:c="2"/>Stack 最多放多少頂點？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6"><text:s text:c="2"/>最壞情況（線形圖 A-B-C-D-...-Z）：</text:p>
          </table:table-cell>
        </table:table-row>
        <table:table-row table:style-name="表格24.1">
          <table:table-cell table:style-name="表格24.A1" office:value-type="string">
            <text:p text:style-name="P26"><text:s text:c="2"/>從 A 一路走到底，Stack 同時疊了 V 個頂點</text:p>
          </table:table-cell>
        </table:table-row>
        <table:table-row table:style-name="表格24.1">
          <table:table-cell table:style-name="表格24.A1" office:value-type="string">
            <text:p text:style-name="P26"><text:s text:c="2"/>→ O(V)</text:p>
          </table:table-cell>
        </table:table-row>
      </table:table>
      <text:h text:style-name="P4" text:outline-level="2">4-4 BFS vs DFS 核心差異</text:h>
      <text:p text:style-name="P8"><text:s text:c="2"/>▎ 視覺化比較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6"><text:s text:c="2"/>同一張圖：</text:p>
          </table:table-cell>
        </table:table-row>
        <table:table-row table:style-name="表格25.1">
          <table:table-cell table:style-name="表格25.A1" office:value-type="string">
            <text:p text:style-name="P26"><text:s text:c="17"/>1</text:p>
          </table:table-cell>
        </table:table-row>
        <table:table-row table:style-name="表格25.1">
          <table:table-cell table:style-name="表格25.A1" office:value-type="string">
            <text:p text:style-name="P26"><text:s text:c="15"/>/ <text:s text:c="2"/>\</text:p>
          </table:table-cell>
        </table:table-row>
        <table:table-row table:style-name="表格25.1">
          <table:table-cell table:style-name="表格25.A1" office:value-type="string">
            <text:p text:style-name="P26"><text:s text:c="14"/>2 <text:s text:c="4"/>3</text:p>
          </table:table-cell>
        </table:table-row>
        <table:table-row table:style-name="表格25.1">
          <table:table-cell table:style-name="表格25.A1" office:value-type="string">
            <text:p text:style-name="P26"><text:s text:c="13"/>/ \ <text:s text:c="2"/>/ \</text:p>
          </table:table-cell>
        </table:table-row>
        <table:table-row table:style-name="表格25.1">
          <table:table-cell table:style-name="表格25.A1" office:value-type="string">
            <text:p text:style-name="P26"><text:s text:c="12"/>4 <text:s text:c="2"/>5 6 <text:s text:c="2"/>7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6"><text:s text:c="2"/>BFS 訪問順序（Queue）：1, 2, 3, 4, 5, 6, 7</text:p>
          </table:table-cell>
        </table:table-row>
        <table:table-row table:style-name="表格25.1">
          <table:table-cell table:style-name="表格25.A1" office:value-type="string">
            <text:p text:style-name="P26"><text:s text:c="2"/>（一層一層橫向展開）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6"><text:s text:c="2"/>DFS 訪問順序（Stack）：1, 2, 4, 5, 3, 6, 7</text:p>
          </table:table-cell>
        </table:table-row>
        <table:table-row table:style-name="表格25.1">
          <table:table-cell table:style-name="表格25.A1" office:value-type="string">
            <text:p text:style-name="P26"><text:s text:c="2"/>（沿著一條路衝到底，再回頭）</text:p>
          </table:table-cell>
        </table:table-row>
      </table:table>
      <text:p text:style-name="P1"/>
      <table:table table:name="表格26" table:style-name="表格26">
        <table:table-column table:style-name="表格26.A"/>
        <table:table-column table:style-name="表格26.B" table:number-columns-repeated="2"/>
        <table:table-row table:style-name="表格26.1">
          <table:table-cell table:style-name="表格26.A1" office:value-type="string">
            <text:p text:style-name="P27">項目</text:p>
          </table:table-cell>
          <table:table-cell table:style-name="表格26.A1" office:value-type="string">
            <text:p text:style-name="P28">BFS（廣度優先）</text:p>
          </table:table-cell>
          <table:table-cell table:style-name="表格26.A1" office:value-type="string">
            <text:p text:style-name="P28">DFS（深度優先）</text:p>
          </table:table-cell>
        </table:table-row>
        <table:table-row table:style-name="表格26.1">
          <table:table-cell table:style-name="表格26.A2" office:value-type="string">
            <text:p text:style-name="P21">資料結構</text:p>
          </table:table-cell>
          <table:table-cell table:style-name="表格26.B2" office:value-type="string">
            <text:p text:style-name="P10">Queue（先進先出）</text:p>
          </table:table-cell>
          <table:table-cell table:style-name="表格26.C2" office:value-type="string">
            <text:p text:style-name="P14">Stack（後進先出）</text:p>
          </table:table-cell>
        </table:table-row>
        <table:table-row table:style-name="表格26.1">
          <table:table-cell table:style-name="表格26.A3" office:value-type="string">
            <text:p text:style-name="P21">記憶口訣</text:p>
          </table:table-cell>
          <table:table-cell table:style-name="表格26.B3" office:value-type="string">
            <text:p text:style-name="P35">B → Q</text:p>
          </table:table-cell>
          <table:table-cell table:style-name="表格26.B3" office:value-type="string">
            <text:p text:style-name="P35">D → S</text:p>
          </table:table-cell>
        </table:table-row>
        <table:table-row table:style-name="表格26.1">
          <table:table-cell table:style-name="表格26.A2" office:value-type="string">
            <text:p text:style-name="P21">探索方向</text:p>
          </table:table-cell>
          <table:table-cell table:style-name="表格26.A3" office:value-type="string">
            <text:p text:style-name="P20">橫向（層次展開）</text:p>
          </table:table-cell>
          <table:table-cell table:style-name="表格26.A3" office:value-type="string">
            <text:p text:style-name="P20">縱向（深入到底）</text:p>
          </table:table-cell>
        </table:table-row>
        <table:table-row table:style-name="表格26.1">
          <table:table-cell table:style-name="表格26.A3" office:value-type="string">
            <text:p text:style-name="P21">時間複雜度</text:p>
          </table:table-cell>
          <table:table-cell table:style-name="表格26.B5" office:value-type="string">
            <text:p text:style-name="P34">O(V+E)</text:p>
          </table:table-cell>
          <table:table-cell table:style-name="表格26.B5" office:value-type="string">
            <text:p text:style-name="P34">O(V+E)</text:p>
          </table:table-cell>
        </table:table-row>
        <table:table-row table:style-name="表格26.1">
          <table:table-cell table:style-name="表格26.A2" office:value-type="string">
            <text:p text:style-name="P21">空間複雜度</text:p>
          </table:table-cell>
          <table:table-cell table:style-name="表格26.A2" office:value-type="string">
            <text:p text:style-name="P20">O(V)</text:p>
          </table:table-cell>
          <table:table-cell table:style-name="表格26.A2" office:value-type="string">
            <text:p text:style-name="P20">O(V)</text:p>
          </table:table-cell>
        </table:table-row>
      </table:table>
      <text:p text:style-name="Standard"/>
      <text:h text:style-name="P5" text:outline-level="1">五、Topological Sort（拓樸排序）─ 含完整圖解</text:h>
      <text:p text:style-name="P1"/>
      <text:h text:style-name="P4" text:outline-level="2">5-1 什麼是拓樸排序？</text:h>
      <text:p text:style-name="P8"><text:s text:c="2"/>▎ 生活例子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<text:s text:c="2"/>穿衣服的順序（你不能反著來）：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6"><text:s text:c="2"/>穿內衣 → 穿襯衫 → 穿外套</text:p>
          </table:table-cell>
        </table:table-row>
        <table:table-row table:style-name="表格27.1">
          <table:table-cell table:style-name="表格27.A1" office:value-type="string">
            <text:p text:style-name="P26"><text:s text:c="2"/>穿內褲 → 穿褲子 → 穿皮帶</text:p>
          </table:table-cell>
        </table:table-row>
        <table:table-row table:style-name="表格27.1">
          <table:table-cell table:style-name="表格27.A1" office:value-type="string">
            <text:p text:style-name="P26"><text:s text:c="2"/>穿襪子 → 穿鞋子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6"><text:s text:c="2"/>這就是 DAG + Topological Sort 的概念：</text:p>
          </table:table-cell>
        </table:table-row>
        <table:table-row table:style-name="表格27.1">
          <table:table-cell table:style-name="表格27.A1" office:value-type="string">
            <text:p text:style-name="P26"><text:s text:c="2"/>有「先後依賴關係」的任務排序</text:p>
          </table:table-cell>
        </table:table-row>
      </table:table>
      <text:p text:style-name="P1"/>
      <text:h text:style-name="P4" text:outline-level="2">5-2 In-degree 圖解</text:h>
      <text:p text:style-name="P8"><text:s text:c="2"/>▎ 什麼是 in-degree？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6"><text:s text:c="2"/>圖形：</text:p>
          </table:table-cell>
        </table:table-row>
        <table:table-row table:style-name="表格28.1">
          <table:table-cell table:style-name="表格28.A1" office:value-type="string">
            <text:p text:style-name="P26"><text:s text:c="30"/>in-degree：</text:p>
          </table:table-cell>
        </table:table-row>
        <table:table-row table:style-name="表格28.1">
          <table:table-cell table:style-name="表格28.A1" office:value-type="string">
            <text:p text:style-name="P26"><text:s text:c="4"/>① <text:s/>──────────→ <text:s/>④ <text:s text:c="8"/>① = 0（沒有箭頭指進來）</text:p>
          </table:table-cell>
        </table:table-row>
        <table:table-row table:style-name="表格28.1">
          <table:table-cell table:style-name="表格28.A1" office:value-type="string">
            <text:p text:style-name="P26"><text:s text:c="4"/>① <text:s/>──→ <text:s/>③ <text:s/>──→ <text:s/>④ <text:s text:c="8"/>② = 0</text:p>
          </table:table-cell>
        </table:table-row>
        <table:table-row table:style-name="表格28.1">
          <table:table-cell table:style-name="表格28.A1" office:value-type="string">
            <text:p text:style-name="P26"><text:s text:c="4"/>② <text:s/>──────────→ <text:s/>③ <text:s text:c="8"/>③ = 2（① 和 ② 都指向 ③）</text:p>
          </table:table-cell>
        </table:table-row>
        <table:table-row table:style-name="表格28.1">
          <table:table-cell table:style-name="表格28.A1" office:value-type="string">
            <text:p text:style-name="P26"><text:s text:c="4"/>② <text:s/>──→ <text:s/>④ <text:s text:c="16"/>④ = 3（①②③都指向它）</text:p>
          </table:table-cell>
        </table:table-row>
        <table:table-row table:style-name="表格28.1">
          <table:table-cell table:style-name="表格28.A1" office:value-type="string">
            <text:p text:style-name="P2"/>
          </table:table-cell>
        </table:table-row>
        <table:table-row table:style-name="表格28.1">
          <table:table-cell table:style-name="表格28.A1" office:value-type="string">
            <text:p text:style-name="P26"><text:s text:c="2"/>in-degree = 0 的頂點 → 沒有前置依賴 → 可以最先完成</text:p>
          </table:table-cell>
        </table:table-row>
        <table:table-row table:style-name="表格28.1">
          <table:table-cell table:style-name="表格28.A1" office:value-type="string">
            <text:p text:style-name="P26"><text:s text:c="2"/>此例：① 和 ② 可以先做</text:p>
          </table:table-cell>
        </table:table-row>
      </table:table>
      <text:p text:style-name="P1"/>
      <text:h text:style-name="P4" text:outline-level="2">5-3 Kahn's Algorithm 逐步圖解</text:h>
      <text:p text:style-name="P8"><text:s text:c="2"/>▎ 使用圖形：課程修課依賴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6"><text:s text:c="2"/>節點代表課程，邊代表「先修要求」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6"><text:s text:c="2"/>數學(M) ──→ 線代(L) ──→ 機器學習(ML)</text:p>
          </table:table-cell>
        </table:table-row>
        <table:table-row table:style-name="表格29.1">
          <table:table-cell table:style-name="表格29.A1" office:value-type="string">
            <text:p text:style-name="P26"><text:s text:c="16"/>│</text:p>
          </table:table-cell>
        </table:table-row>
        <table:table-row table:style-name="表格29.1">
          <table:table-cell table:style-name="表格29.A1" office:value-type="string">
            <text:p text:style-name="P26"><text:s text:c="2"/>統計(S) ──→ 機率(P) ──→ 機器學習(ML)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6"><text:s text:c="2"/>in-degree：M=0 <text:s/>S=0 <text:s/>L=1 <text:s/>P=1 <text:s/>ML=2</text:p>
          </table:table-cell>
        </table:table-row>
      </table:table>
      <text:p text:style-name="P1"/>
      <text:p text:style-name="P8"><text:s text:c="2"/>▎ 每一步驟狀態追蹤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8">步</text:p>
          </table:table-cell>
          <table:table-cell table:style-name="表格30.A1" office:value-type="string">
            <text:p text:style-name="P27">動作</text:p>
          </table:table-cell>
          <table:table-cell table:style-name="表格30.A1" office:value-type="string">
            <text:p text:style-name="P28">各頂點 in-degree</text:p>
          </table:table-cell>
          <table:table-cell table:style-name="表格30.A1" office:value-type="string">
            <text:p text:style-name="P28">Queue</text:p>
          </table:table-cell>
          <table:table-cell table:style-name="表格30.A1" office:value-type="string">
            <text:p text:style-name="P28">輸出</text:p>
          </table:table-cell>
        </table:table-row>
        <table:table-row table:style-name="表格30.1">
          <table:table-cell table:style-name="表格30.A2" office:value-type="string">
            <text:p text:style-name="P14">初始</text:p>
          </table:table-cell>
          <table:table-cell table:style-name="表格30.A2" office:value-type="string">
            <text:p text:style-name="P19">計算所有 in-degree 將 in-degree=0 的放入 Queue</text:p>
          </table:table-cell>
          <table:table-cell table:style-name="表格30.A2" office:value-type="string">
            <text:p text:style-name="P24">M=0 S=0 L=1 P=1 ML=2</text:p>
          </table:table-cell>
          <table:table-cell table:style-name="表格30.A2" office:value-type="string">
            <text:p text:style-name="P23">[ M, S ]</text:p>
          </table:table-cell>
          <table:table-cell table:style-name="表格30.A2" office:value-type="string">
            <text:p text:style-name="P20">（空）</text:p>
          </table:table-cell>
        </table:table-row>
        <table:table-row table:style-name="表格30.1">
          <table:table-cell table:style-name="表格30.A3" office:value-type="string">
            <text:p text:style-name="P14">①</text:p>
          </table:table-cell>
          <table:table-cell table:style-name="表格30.A3" office:value-type="string">
            <text:p text:style-name="P19">取出 M → 輸出 M 刪除 M→L，L 的 in-degree 從 1→0 → 將 L 加入 Queue</text:p>
          </table:table-cell>
          <table:table-cell table:style-name="表格30.A3" office:value-type="string">
            <text:p text:style-name="P24">M=✓ S=0 L=0 P=1 ML=2</text:p>
          </table:table-cell>
          <table:table-cell table:style-name="表格30.A3" office:value-type="string">
            <text:p text:style-name="P23">[ S, L ]</text:p>
          </table:table-cell>
          <table:table-cell table:style-name="表格30.A3" office:value-type="string">
            <text:p text:style-name="P20">M</text:p>
          </table:table-cell>
        </table:table-row>
        <table:table-row table:style-name="表格30.1">
          <table:table-cell table:style-name="表格30.A2" office:value-type="string">
            <text:p text:style-name="P14">②</text:p>
          </table:table-cell>
          <table:table-cell table:style-name="表格30.A2" office:value-type="string">
            <text:p text:style-name="P19">取出 S → 輸出 S 刪除 S→P，P 的 in-degree 從 1→0 → 將 P 加入 Queue</text:p>
          </table:table-cell>
          <table:table-cell table:style-name="表格30.A2" office:value-type="string">
            <text:p text:style-name="P24">M=✓ S=✓ L=0 P=0 ML=2</text:p>
          </table:table-cell>
          <table:table-cell table:style-name="表格30.A2" office:value-type="string">
            <text:p text:style-name="P23">[ L, P ]</text:p>
          </table:table-cell>
          <table:table-cell table:style-name="表格30.A2" office:value-type="string">
            <text:p text:style-name="P20">M S</text:p>
          </table:table-cell>
        </table:table-row>
        <table:table-row table:style-name="表格30.1">
          <table:table-cell table:style-name="表格30.A3" office:value-type="string">
            <text:p text:style-name="P14">③</text:p>
          </table:table-cell>
          <table:table-cell table:style-name="表格30.A3" office:value-type="string">
            <text:p text:style-name="P19">取出 L → 輸出 L 刪除 L→ML，ML 的 in-degree 2→1</text:p>
          </table:table-cell>
          <table:table-cell table:style-name="表格30.A3" office:value-type="string">
            <text:p text:style-name="P24">M=✓ S=✓ L=✓ P=0 ML=1</text:p>
          </table:table-cell>
          <table:table-cell table:style-name="表格30.A3" office:value-type="string">
            <text:p text:style-name="P23">[ P ]</text:p>
          </table:table-cell>
          <table:table-cell table:style-name="表格30.A3" office:value-type="string">
            <text:p text:style-name="P20">M S L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14">④</text:p>
          </table:table-cell>
          <table:table-cell table:style-name="表格30.A2" office:value-type="string">
            <text:p text:style-name="P19">取出 P → 輸出 P 刪除 P→ML，ML 的 in-degree 1→0 → 將 ML 加入 Queue</text:p>
          </table:table-cell>
          <table:table-cell table:style-name="表格30.A2" office:value-type="string">
            <text:p text:style-name="P24">M=✓ S=✓ L=✓ P=✓ ML=0</text:p>
          </table:table-cell>
          <table:table-cell table:style-name="表格30.A2" office:value-type="string">
            <text:p text:style-name="P23">[ ML ]</text:p>
          </table:table-cell>
          <table:table-cell table:style-name="表格30.A2" office:value-type="string">
            <text:p text:style-name="P20">M S L P</text:p>
          </table:table-cell>
        </table:table-row>
        <table:table-row table:style-name="表格30.1">
          <table:table-cell table:style-name="表格30.A3" office:value-type="string">
            <text:p text:style-name="P14">⑤</text:p>
          </table:table-cell>
          <table:table-cell table:style-name="表格30.A3" office:value-type="string">
            <text:p text:style-name="P19">取出 ML → 輸出 ML 無後繼節點，Queue 空</text:p>
          </table:table-cell>
          <table:table-cell table:style-name="表格30.A3" office:value-type="string">
            <text:p text:style-name="P25">全部 ✓</text:p>
          </table:table-cell>
          <table:table-cell table:style-name="表格30.A3" office:value-type="string">
            <text:p text:style-name="P23">[ ]（空）</text:p>
          </table:table-cell>
          <table:table-cell table:style-name="表格30.A3" office:value-type="string">
            <text:p text:style-name="P32">M S L P ML</text:p>
          </table:table-cell>
        </table:table-row>
      </table:table>
      <text:p text:style-name="P1"/>
      <text:h text:style-name="P4" text:outline-level="2">5-4 為什麼有 Cycle 就無法排序？（圖解）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6"><text:s text:c="2"/>有 Cycle 的圖：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6"><text:s text:c="4"/>A ──→ B ──→ C ──→ A <text:s/>（形成環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6"><text:s text:c="2"/>in-degree 計算：</text:p>
          </table:table-cell>
        </table:table-row>
        <table:table-row table:style-name="表格31.1">
          <table:table-cell table:style-name="表格31.A1" office:value-type="string">
            <text:p text:style-name="P26"><text:s text:c="4"/>in-degree(A) = 1 <text:s/>（C→A）</text:p>
          </table:table-cell>
        </table:table-row>
        <table:table-row table:style-name="表格31.1">
          <table:table-cell table:style-name="表格31.A1" office:value-type="string">
            <text:p text:style-name="P26"><text:s text:c="4"/>in-degree(B) = 1 <text:s/>（A→B）</text:p>
          </table:table-cell>
        </table:table-row>
        <table:table-row table:style-name="表格31.1">
          <table:table-cell table:style-name="表格31.A1" office:value-type="string">
            <text:p text:style-name="P26"><text:s text:c="4"/>in-degree(C) = 1 <text:s/>（B→C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6"><text:s text:c="2"/>所有頂點的 in-degree 都 ≥ 1</text:p>
          </table:table-cell>
        </table:table-row>
        <table:table-row table:style-name="表格31.1">
          <table:table-cell table:style-name="表格31.A1" office:value-type="string">
            <text:p text:style-name="P26"><text:s text:c="2"/>→ Queue 永遠是空的</text:p>
          </table:table-cell>
        </table:table-row>
        <table:table-row table:style-name="表格31.1">
          <table:table-cell table:style-name="表格31.A1" office:value-type="string">
            <text:p text:style-name="P26"><text:s text:c="2"/>→ 演算法無法取出任何頂點</text:p>
          </table:table-cell>
        </table:table-row>
        <table:table-row table:style-name="表格31.1">
          <table:table-cell table:style-name="表格31.A1" office:value-type="string">
            <text:p text:style-name="P26"><text:s text:c="2"/>→ 輸出序列長度 &lt; V → 偵測到 Cycle！</text:p>
          </table:table-cell>
        </table:table-row>
      </table:table>
      <text:p text:style-name="P1"/>
      <text:h text:style-name="P4" text:outline-level="2">5-5 Topological Sort 時間複雜度推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6"><text:s text:c="2"/>Kahn's Algorithm 分析：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6"><text:s text:c="2"/>① 計算所有 in-degree <text:s text:c="9"/>→ 掃描所有邊 <text:s/>O(E)</text:p>
          </table:table-cell>
        </table:table-row>
        <table:table-row table:style-name="表格32.1">
          <table:table-cell table:style-name="表格32.A1" office:value-type="string">
            <text:p text:style-name="P26"><text:s text:c="2"/>② 初始化 Queue（in-degree=0）→ 掃描所有頂點 O(V)</text:p>
          </table:table-cell>
        </table:table-row>
        <table:table-row table:style-name="表格32.1">
          <table:table-cell table:style-name="表格32.A1" office:value-type="string">
            <text:p text:style-name="P26"><text:s text:c="2"/>③ 每個頂點最多進出 Queue 一次 → O(V)</text:p>
          </table:table-cell>
        </table:table-row>
        <table:table-row table:style-name="表格32.1">
          <table:table-cell table:style-name="表格32.A1" office:value-type="string">
            <text:p text:style-name="P26"><text:s text:c="2"/>④ 每條邊最多被刪除一次 <text:s text:c="7"/>→ O(E)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6"><text:s text:c="2"/>總時間複雜度：O(V + E)</text:p>
          </table:table-cell>
        </table:table-row>
        <table:table-row table:style-name="表格32.1">
          <table:table-cell table:style-name="表格32.A1" office:value-type="string">
            <text:p text:style-name="P26"><text:s text:c="2"/>空間複雜度：O(V)（Queue 最多 V 個頂點）</text:p>
          </table:table-cell>
        </table:table-row>
      </table:table>
      <text:p text:style-name="Standard"/>
      <text:h text:style-name="P5" text:outline-level="1">六、Prim 演算法（MST）─ 含完整圖解</text:h>
      <text:p text:style-name="P1"/>
      <text:h text:style-name="P4" text:outline-level="2">6-1 MST 是什麼？圖解說明</text:h>
      <text:p text:style-name="P8"><text:s text:c="2"/>▎ 問題：如何用最少成本把所有城市接通網路？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6"><text:s text:c="2"/>圖形（V={T,W,X,Y,Z}）：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6"><text:s text:c="7"/>T ─2─ W ─4─ X</text:p>
          </table:table-cell>
        </table:table-row>
        <table:table-row table:style-name="表格33.1">
          <table:table-cell table:style-name="表格33.A1" office:value-type="string">
            <text:p text:style-name="P26"><text:s text:c="7"/>|\ <text:s text:c="3"/>| <text:s text:c="4"/>|</text:p>
          </table:table-cell>
        </table:table-row>
        <table:table-row table:style-name="表格33.1">
          <table:table-cell table:style-name="表格33.A1" office:value-type="string">
            <text:p text:style-name="P26"><text:s text:c="7"/>1 7 <text:s text:c="2"/>3 <text:s text:c="4"/>6</text:p>
          </table:table-cell>
        </table:table-row>
        <table:table-row table:style-name="表格33.1">
          <table:table-cell table:style-name="表格33.A1" office:value-type="string">
            <text:p text:style-name="P26"><text:s text:c="7"/>| <text:s/>\ <text:s/>| <text:s text:c="4"/>|</text:p>
          </table:table-cell>
        </table:table-row>
        <table:table-row table:style-name="表格33.1">
          <table:table-cell table:style-name="表格33.A1" office:value-type="string">
            <text:p text:style-name="P26"><text:s text:c="7"/>Y <text:s text:c="2"/>──Z─────┘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6"><text:s text:c="2"/>所有邊：(T,W)=2 <text:s/>(T,Y)=1 <text:s/>(T,Z)=7</text:p>
          </table:table-cell>
        </table:table-row>
        <table:table-row table:style-name="表格33.1">
          <table:table-cell table:style-name="表格33.A1" office:value-type="string">
            <text:p text:style-name="P26"><text:s text:c="9"/>(W,X)=4 <text:s/>(W,Z)=3 <text:s/>(X,Z)=6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6"><text:s text:c="2"/>目標：選最少成本的 V-1=4 條邊，讓所有頂點相連</text:p>
          </table:table-cell>
        </table:table-row>
        <table:table-row table:style-name="表格33.1">
          <table:table-cell table:style-name="表格33.A1" office:value-type="string">
            <text:p text:style-name="P26"><text:s text:c="8"/>且不能形成 Cycle</text:p>
          </table:table-cell>
        </table:table-row>
      </table:table>
      <text:p text:style-name="P1"/>
      <text:h text:style-name="P4" text:outline-level="2">6-2 Prim 演算法逐步圖解（從 X 出發）</text:h>
      <text:p text:style-name="P8"><text:s text:c="2"/>▎ 每一步選「連接樹與非樹頂點之間，最短的邊」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office:value-type="string">
            <text:p text:style-name="P28">步</text:p>
          </table:table-cell>
          <table:table-cell table:style-name="表格34.A1" office:value-type="string">
            <text:p text:style-name="P27">候選邊（樹 ↔ 非樹）</text:p>
          </table:table-cell>
          <table:table-cell table:style-name="表格34.A1" office:value-type="string">
            <text:p text:style-name="P27">選擇（最小）</text:p>
          </table:table-cell>
          <table:table-cell table:style-name="表格34.A1" office:value-type="string">
            <text:p text:style-name="P28">目前樹</text:p>
          </table:table-cell>
          <table:table-cell table:style-name="表格34.A1" office:value-type="string">
            <text:p text:style-name="P28">累計</text:p>
          </table:table-cell>
        </table:table-row>
        <table:table-row table:style-name="表格34.1">
          <table:table-cell table:style-name="表格34.A2" office:value-type="string">
            <text:p text:style-name="P14">出發</text:p>
          </table:table-cell>
          <table:table-cell table:style-name="表格34.B2" office:value-type="string">
            <text:p text:style-name="P19">樹={X} <text:s/>非樹={T,W,Y,Z}</text:p>
          </table:table-cell>
          <table:table-cell table:style-name="表格34.B2" office:value-type="string">
            <text:p text:style-name="P19">選起點 X，加入樹</text:p>
          </table:table-cell>
          <table:table-cell table:style-name="表格34.B2" office:value-type="string">
            <text:p text:style-name="P20">{X}</text:p>
          </table:table-cell>
          <table:table-cell table:style-name="表格34.B2" office:value-type="string">
            <text:p text:style-name="P20">0</text:p>
          </table:table-cell>
        </table:table-row>
        <table:table-row table:style-name="表格34.1">
          <table:table-cell table:style-name="表格34.A2" office:value-type="string">
            <text:p text:style-name="P14">①</text:p>
          </table:table-cell>
          <table:table-cell table:style-name="表格34.B3" office:value-type="string">
            <text:p text:style-name="P19">(X,W)=4 <text:s/>← 最小 (X,Z)=6</text:p>
          </table:table-cell>
          <table:table-cell table:style-name="表格34.C3" office:value-type="string">
            <text:p text:style-name="P33">選 (X,W)=4 加入 W</text:p>
          </table:table-cell>
          <table:table-cell table:style-name="表格34.B3" office:value-type="string">
            <text:p text:style-name="P20">{X,W}</text:p>
          </table:table-cell>
          <table:table-cell table:style-name="表格34.B3" office:value-type="string">
            <text:p text:style-name="P32">4</text:p>
          </table:table-cell>
        </table:table-row>
        <table:table-row table:style-name="表格34.1">
          <table:table-cell table:style-name="表格34.A2" office:value-type="string">
            <text:p text:style-name="P14">②</text:p>
          </table:table-cell>
          <table:table-cell table:style-name="表格34.B2" office:value-type="string">
            <text:p text:style-name="P19">(W,T)=2 <text:s/>← 最小 (W,Z)=3 (X,Z)=6</text:p>
          </table:table-cell>
          <table:table-cell table:style-name="表格34.C3" office:value-type="string">
            <text:p text:style-name="P33">選 (W,T)=2 加入 T</text:p>
          </table:table-cell>
          <table:table-cell table:style-name="表格34.B2" office:value-type="string">
            <text:p text:style-name="P20">{X,W,T}</text:p>
          </table:table-cell>
          <table:table-cell table:style-name="表格34.B2" office:value-type="string">
            <text:p text:style-name="P32">4+2=6</text:p>
          </table:table-cell>
        </table:table-row>
        <table:table-row table:style-name="表格34.1">
          <table:table-cell table:style-name="表格34.A2" office:value-type="string">
            <text:p text:style-name="P14">③</text:p>
          </table:table-cell>
          <table:table-cell table:style-name="表格34.B3" office:value-type="string">
            <text:p text:style-name="P19">(T,Y)=1 <text:s/>← 最小 (W,Z)=3 (X,Z)=6 (T,Z)=7</text:p>
          </table:table-cell>
          <table:table-cell table:style-name="表格34.C3" office:value-type="string">
            <text:p text:style-name="P33">選 (T,Y)=1 加入 Y</text:p>
          </table:table-cell>
          <table:table-cell table:style-name="表格34.B3" office:value-type="string">
            <text:p text:style-name="P20">{X,W,T,Y}</text:p>
          </table:table-cell>
          <table:table-cell table:style-name="表格34.B3" office:value-type="string">
            <text:p text:style-name="P32">6+1=7</text:p>
          </table:table-cell>
        </table:table-row>
        <table:table-row table:style-name="表格34.1">
          <table:table-cell table:style-name="表格34.A2" office:value-type="string">
            <text:p text:style-name="P14">④</text:p>
          </table:table-cell>
          <table:table-cell table:style-name="表格34.B2" office:value-type="string">
            <text:p text:style-name="P19">(W,Z)=3 <text:s/>← 最小 (X,Z)=6 (T,Z)=7</text:p>
          </table:table-cell>
          <table:table-cell table:style-name="表格34.C3" office:value-type="string">
            <text:p text:style-name="P33">選 (W,Z)=3 加入 Z（完成！）</text:p>
          </table:table-cell>
          <table:table-cell table:style-name="表格34.B2" office:value-type="string">
            <text:p text:style-name="P20">{X,W,T,Y,Z}</text:p>
          </table:table-cell>
          <table:table-cell table:style-name="表格34.E6" office:value-type="string">
            <text:p text:style-name="P35">7+3=10★</text:p>
          </table:table-cell>
        </table:table-row>
      </table:table>
      <text:p text:style-name="P1"/>
      <text:p text:style-name="P8"><text:s text:c="2"/>▎ 最終 MST 圖示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6"><text:s text:c="2"/>MST 結果（選出的 4 條邊）：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6"><text:s text:c="7"/>T ─2─ W ─4─ X</text:p>
          </table:table-cell>
        </table:table-row>
        <table:table-row table:style-name="表格35.1">
          <table:table-cell table:style-name="表格35.A1" office:value-type="string">
            <text:p text:style-name="P26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6"><text:s text:c="7"/>1 <text:s text:c="4"/>3</text:p>
          </table:table-cell>
        </table:table-row>
        <table:table-row table:style-name="表格35.1">
          <table:table-cell table:style-name="表格35.A1" office:value-type="string">
            <text:p text:style-name="P26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6"><text:s text:c="7"/>Y <text:s text:c="4"/>Z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6"><text:s text:c="2"/>選出：X-W(4) <text:s/>W-T(2) <text:s/>T-Y(1) <text:s/>W-Z(3)</text:p>
          </table:table-cell>
        </table:table-row>
        <table:table-row table:style-name="表格35.1">
          <table:table-cell table:style-name="表格35.A1" office:value-type="string">
            <text:p text:style-name="P26"><text:s text:c="2"/>總權重 = 4 + 2 + 1 + 3 = 10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6"><text:s text:c="2"/>未選：T-Z(7) <text:s/>X-Z(6) <text:s/>← 加入會形成 Cycle 或不是最小</text:p>
          </table:table-cell>
        </table:table-row>
      </table:table>
      <text:p text:style-name="P1"/>
      <text:h text:style-name="P4" text:outline-level="2">6-3 Prim 時間複雜度推導</text:h>
      <text:p text:style-name="P8"><text:s text:c="2"/>▎ 使用相鄰矩陣：O(V²)</text:p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6"><text:s text:c="2"/>Prim 的核心操作：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6"><text:s text:c="2"/>每一輪從「候選邊」中找最小的一條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6"><text:s text:c="2"/>使用矩陣的做法：</text:p>
          </table:table-cell>
        </table:table-row>
        <table:table-row table:style-name="表格36.1">
          <table:table-cell table:style-name="表格36.A1" office:value-type="string">
            <text:p text:style-name="P26"><text:s text:c="4"/>維護一個 dist[] 陣列，dist[v] = 目前連接 v 到樹的最小邊權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6"><text:s text:c="2"/>每一輪：</text:p>
          </table:table-cell>
        </table:table-row>
        <table:table-row table:style-name="表格36.1">
          <table:table-cell table:style-name="表格36.A1" office:value-type="string">
            <text:p text:style-name="P26"><text:s text:c="4"/>① 掃描所有 V 個頂點，找 dist 最小的 <text:s/>→ O(V)</text:p>
          </table:table-cell>
        </table:table-row>
        <table:table-row table:style-name="表格36.1">
          <table:table-cell table:style-name="表格36.A1" office:value-type="string">
            <text:p text:style-name="P26"><text:s text:c="4"/>② 更新鄰居的 dist <text:s text:c="19"/>→ 掃描矩陣第 u 列 → O(V)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6"><text:s text:c="2"/>總共執行 V 輪：</text:p>
          </table:table-cell>
        </table:table-row>
        <table:table-row table:style-name="表格36.1">
          <table:table-cell table:style-name="表格36.A1" office:value-type="string">
            <text:p text:style-name="P26"><text:s text:c="4"/>V 輪 × O(V) = O(V²)</text:p>
          </table:table-cell>
        </table:table-row>
      </table:table>
      <text:p text:style-name="P8"><text:s text:c="2"/>▎ 使用 Binary Heap（最小堆）：O(E log V)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6"><text:s text:c="2"/>改用 Priority Queue（最小堆）儲存候選邊：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6"><text:s text:c="2"/>每一輪：</text:p>
          </table:table-cell>
        </table:table-row>
        <table:table-row table:style-name="表格37.1">
          <table:table-cell table:style-name="表格37.A1" office:value-type="string">
            <text:p text:style-name="P26"><text:s text:c="4"/>① 從堆中取出最小邊（extract-min） <text:s/>→ O(log V)</text:p>
          </table:table-cell>
        </table:table-row>
        <table:table-row table:style-name="表格37.1">
          <table:table-cell table:style-name="表格37.A1" office:value-type="string">
            <text:p text:style-name="P26"><text:s text:c="4"/>② 將新加入頂點的鄰居邊加入堆 <text:s text:c="6"/>→ O(log V) 每條邊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6"><text:s text:c="2"/>每條邊最多被加入堆一次 → 共 E 次 O(log V) 操作</text:p>
          </table:table-cell>
        </table:table-row>
        <table:table-row table:style-name="表格37.1">
          <table:table-cell table:style-name="表格37.A1" office:value-type="string">
            <text:p text:style-name="P26"><text:s text:c="4"/>總計：O(E log V)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6"><text:s text:c="2"/>比較：</text:p>
          </table:table-cell>
        </table:table-row>
        <table:table-row table:style-name="表格37.1">
          <table:table-cell table:style-name="表格37.A1" office:value-type="string">
            <text:p text:style-name="P26"><text:s text:c="4"/>稠密圖（E ≈ V²）：O(E log V) = O(V² log V) &gt; O(V²) → 矩陣更好</text:p>
          </table:table-cell>
        </table:table-row>
        <table:table-row table:style-name="表格37.1">
          <table:table-cell table:style-name="表格37.A1" office:value-type="string">
            <text:p text:style-name="P26"><text:s text:c="4"/>稀疏圖（E ≈ V） ：O(E log V) = O(V log V) <text:s/>&lt; O(V²) → 堆更好</text:p>
          </table:table-cell>
        </table:table-row>
      </table:table>
      <text:p text:style-name="Standard"/>
      <text:h text:style-name="P5" text:outline-level="1">七、Adjacency Multilist 深度解析（含完整圖解）</text:h>
      <text:p text:style-name="P1"/>
      <text:h text:style-name="P4" text:outline-level="2">7-1 問題：為什麼 Adjacency List 還不夠好？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6"><text:s text:c="2"/>Adjacency List 的問題：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6"><text:s text:c="2"/>圖形：A ── B ── C</text:p>
          </table:table-cell>
        </table:table-row>
        <table:table-row table:style-name="表格38.1">
          <table:table-cell table:style-name="表格38.A1" office:value-type="string">
            <text:p text:style-name="P26"><text:s text:c="9"/>\ <text:s text:c="6"/>/</text:p>
          </table:table-cell>
        </table:table-row>
        <table:table-row table:style-name="表格38.1">
          <table:table-cell table:style-name="表格38.A1" office:value-type="string">
            <text:p text:style-name="P26"><text:s text:c="10"/>───────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6"><text:s text:c="2"/>邊：(A,B) <text:s/>(B,C) <text:s/>(A,C) <text:s/>共 3 條邊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6"><text:s text:c="2"/>但 List 存法：</text:p>
          </table:table-cell>
        </table:table-row>
        <table:table-row table:style-name="表格38.1">
          <table:table-cell table:style-name="表格38.A1" office:value-type="string">
            <text:p text:style-name="P26"><text:s text:c="2"/>A → [B] → [C] → NULL <text:s text:c="5"/>（A-B、A-C 各存一份）</text:p>
          </table:table-cell>
        </table:table-row>
        <table:table-row table:style-name="表格38.1">
          <table:table-cell table:style-name="表格38.A1" office:value-type="string">
            <text:p text:style-name="P26"><text:s text:c="2"/>B → [A] → [C] → NULL <text:s text:c="5"/>（B-A、B-C 各存一份）</text:p>
          </table:table-cell>
        </table:table-row>
        <table:table-row table:style-name="表格38.1">
          <table:table-cell table:style-name="表格38.A1" office:value-type="string">
            <text:p text:style-name="P26"><text:s text:c="2"/>C → [A] → [B] → NULL <text:s text:c="5"/>（C-A、C-B 各存一份）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6"><text:s text:c="2"/>3 條邊，卻存了 6 個節點！</text:p>
          </table:table-cell>
        </table:table-row>
        <table:table-row table:style-name="表格38.1">
          <table:table-cell table:style-name="表格38.A1" office:value-type="string">
            <text:p text:style-name="P26"><text:s text:c="2"/>更新一條邊要改兩個地方（兩端都要改）→ 容易出錯</text:p>
          </table:table-cell>
        </table:table-row>
      </table:table>
      <text:p text:style-name="P1"/>
      <text:h text:style-name="P4" text:outline-level="2">7-2 Multilist 解法：每條邊只存一次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6"><text:s text:c="2"/>同一張圖，改用 Multilist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6"><text:s text:c="2"/>只建立 3 個 Edge 節點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6"><text:s text:c="2"/>e1: [V1=A | V2=B | link1=e2 | link2=e3]</text:p>
          </table:table-cell>
        </table:table-row>
        <table:table-row table:style-name="表格39.1">
          <table:table-cell table:style-name="表格39.A1" office:value-type="string">
            <text:p text:style-name="P26"><text:s text:c="7"/>A 的下一條邊↑ <text:s text:c="2"/>B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6"><text:s text:c="2"/>e2: [V1=A | V2=C | link1=NULL | link2=e3]</text:p>
          </table:table-cell>
        </table:table-row>
        <table:table-row table:style-name="表格39.1">
          <table:table-cell table:style-name="表格39.A1" office:value-type="string">
            <text:p text:style-name="P26"><text:s text:c="7"/>A 無其他邊 ↑ <text:s text:c="3"/>C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6"><text:s text:c="2"/>e3: [V1=B | V2=C | link1=NULL | link2=NULL]</text:p>
          </table:table-cell>
        </table:table-row>
        <table:table-row table:style-name="表格39.1">
          <table:table-cell table:style-name="表格39.A1" office:value-type="string">
            <text:p text:style-name="P26"><text:s text:c="7"/>B 無其他邊 ↑ <text:s text:c="3"/>C 無其他邊 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6"><text:s text:c="2"/>頂點起始指標：</text:p>
          </table:table-cell>
        </table:table-row>
        <table:table-row table:style-name="表格39.1">
          <table:table-cell table:style-name="表格39.A1" office:value-type="string">
            <text:p text:style-name="P26"><text:s text:c="2"/>Vertex A → e1</text:p>
          </table:table-cell>
        </table:table-row>
        <table:table-row table:style-name="表格39.1">
          <table:table-cell table:style-name="表格39.A1" office:value-type="string">
            <text:p text:style-name="P26"><text:s text:c="2"/>Vertex B → e1</text:p>
          </table:table-cell>
        </table:table-row>
        <table:table-row table:style-name="表格39.1">
          <table:table-cell table:style-name="表格39.A1" office:value-type="string">
            <text:p text:style-name="P26"><text:s text:c="2"/>Vertex C → e2</text:p>
          </table:table-cell>
        </table:table-row>
      </table:table>
      <text:p text:style-name="P1"/>
      <text:h text:style-name="P4" text:outline-level="2">7-3 如何利用 link1/link2 走訪所有邊？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6"><text:s text:c="2"/>走訪「頂點 A」的所有邊：</text:p>
          </table:table-cell>
        </table:table-row>
        <table:table-row table:style-name="表格40.1">
          <table:table-cell table:style-name="表格40.A1" office:value-type="string">
            <text:p text:style-name="P26"><text:s text:c="2"/>起點：A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6"><text:s text:c="2"/>e1 = (A,B)：A 是 V1 → 走 link1 → e2</text:p>
          </table:table-cell>
        </table:table-row>
        <table:table-row table:style-name="表格40.1">
          <table:table-cell table:style-name="表格40.A1" office:value-type="string">
            <text:p text:style-name="P26"><text:s text:c="2"/>e2 = (A,C)：A 是 V1 → 走 link1 → NULL</text:p>
          </table:table-cell>
        </table:table-row>
        <table:table-row table:style-name="表格40.1">
          <table:table-cell table:style-name="表格40.A1" office:value-type="string">
            <text:p text:style-name="P26"><text:s text:c="2"/>結束！A 的邊：(A,B) 和 (A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6"><text:s text:c="2"/>走訪「頂點 B」的所有邊：</text:p>
          </table:table-cell>
        </table:table-row>
        <table:table-row table:style-name="表格40.1">
          <table:table-cell table:style-name="表格40.A1" office:value-type="string">
            <text:p text:style-name="P26"><text:s text:c="2"/>起點：B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ext:soft-page-break/>
        <table:table-row table:style-name="表格40.1">
          <table:table-cell table:style-name="表格40.A1" office:value-type="string">
            <text:p text:style-name="P26"><text:s text:c="2"/>e1 = (A,B)：B 是 V2 → 走 link2 → e3</text:p>
          </table:table-cell>
        </table:table-row>
        <table:table-row table:style-name="表格40.1">
          <table:table-cell table:style-name="表格40.A1" office:value-type="string">
            <text:p text:style-name="P26"><text:s text:c="2"/>e3 = (B,C)：B 是 V1 → 走 link1 → NULL</text:p>
          </table:table-cell>
        </table:table-row>
        <table:table-row table:style-name="表格40.1">
          <table:table-cell table:style-name="表格40.A1" office:value-type="string">
            <text:p text:style-name="P26"><text:s text:c="2"/>結束！B 的邊：(A,B) 和 (B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6"><text:s text:c="2"/>關鍵：同一個 Edge 節點，A 走 link1，B 走 link2</text:p>
          </table:table-cell>
        </table:table-row>
        <table:table-row table:style-name="表格40.1">
          <table:table-cell table:style-name="表格40.A1" office:value-type="string">
            <text:p text:style-name="P26"><text:s text:c="2"/>→ 兩端共用同一個節點，卻各自能找到下一條邊！</text:p>
          </table:table-cell>
        </table:table-row>
      </table:table>
      <text:p text:style-name="P1"/>
      <text:h text:style-name="P4" text:outline-level="2">7-4 空間與時間複雜度完整推導</text:h>
      <text:p text:style-name="P8"><text:s text:c="2"/>▎ 空間比較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6"><text:s text:c="2"/>圖形有 V 個頂點，E 條邊：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6"><text:s text:c="2"/>Adjacency List（無向圖）：</text:p>
          </table:table-cell>
        </table:table-row>
        <table:table-row table:style-name="表格41.1">
          <table:table-cell table:style-name="表格41.A1" office:value-type="string">
            <text:p text:style-name="P26"><text:s text:c="4"/>V 個頂點節點 + 2E 個串列節點 = V + 2E = O(V+E)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6"><text:s text:c="2"/>Adjacency Multilist：</text:p>
          </table:table-cell>
        </table:table-row>
        <table:table-row table:style-name="表格41.1">
          <table:table-cell table:style-name="表格41.A1" office:value-type="string">
            <text:p text:style-name="P26"><text:s text:c="4"/>V 個頂點節點 + E 個邊節點 = V + E = O(V+E)</text:p>
          </table:table-cell>
        </table:table-row>
        <table:table-row table:style-name="表格41.1">
          <table:table-cell table:style-name="表格41.A1" office:value-type="string">
            <text:p text:style-name="P26"><text:s text:c="4"/>→ 邊節點少了一半！（只存一份）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6"><text:s text:c="2"/>範例（V=100，E=1000）：</text:p>
          </table:table-cell>
        </table:table-row>
        <table:table-row table:style-name="表格41.1">
          <table:table-cell table:style-name="表格41.A1" office:value-type="string">
            <text:p text:style-name="P26"><text:s text:c="4"/>List <text:s text:c="3"/>：100 + 2000 = 2100 個節點</text:p>
          </table:table-cell>
        </table:table-row>
        <table:table-row table:style-name="表格41.1">
          <table:table-cell table:style-name="表格41.A1" office:value-type="string">
            <text:p text:style-name="P26"><text:s text:c="4"/>Multilist：100 + 1000 = 1100 個節點（節省 47%）</text:p>
          </table:table-cell>
        </table:table-row>
      </table:table>
      <text:p text:style-name="P8"><text:s text:c="2"/>▎ 時間：計算所有頂點 Degree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6"><text:s text:c="2"/>Matrix 做法：</text:p>
          </table:table-cell>
        </table:table-row>
        <table:table-row table:style-name="表格42.1">
          <table:table-cell table:style-name="表格42.A1" office:value-type="string">
            <text:p text:style-name="P26"><text:s text:c="4"/>掃描 n×n 矩陣中每一格 → O(n²)</text:p>
          </table:table-cell>
        </table:table-row>
        <table:table-row table:style-name="表格42.1">
          <table:table-cell table:style-name="表格42.A1" office:value-type="string">
            <text:p text:style-name="P26"><text:s text:c="4"/>（即使 99% 的格子是 0，也要一格一格看）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6"><text:s text:c="2"/>Multilist 做法：</text:p>
          </table:table-cell>
        </table:table-row>
        <table:table-row table:style-name="表格42.1">
          <table:table-cell table:style-name="表格42.A1" office:value-type="string">
            <text:p text:style-name="P26"><text:s text:c="4"/>每個 Edge 節點被走訪兩次（V1 端一次，V2 端一次）</text:p>
          </table:table-cell>
        </table:table-row>
        <table:table-row table:style-name="表格42.1">
          <table:table-cell table:style-name="表格42.A1" office:value-type="string">
            <text:p text:style-name="P26"><text:s text:c="4"/>走訪所有 V 個頂點的起始指標 → O(V)</text:p>
          </table:table-cell>
        </table:table-row>
        <table:table-row table:style-name="表格42.1">
          <table:table-cell table:style-name="表格42.A1" office:value-type="string">
            <text:p text:style-name="P26"><text:s text:c="4"/>走訪所有 E 個邊節點 × 2 <text:s text:c="4"/>→ O(E)</text:p>
          </table:table-cell>
        </table:table-row>
        <table:table-row table:style-name="表格42.1">
          <table:table-cell table:style-name="表格42.A1" office:value-type="string">
            <text:p text:style-name="P26"><text:s text:c="4"/>總計：O(V + E) = O(n + e)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6"><text:s text:c="2"/>差異對比（n=1000，e=10）：</text:p>
          </table:table-cell>
        </table:table-row>
        <table:table-row table:style-name="表格42.1">
          <table:table-cell table:style-name="表格42.A1" office:value-type="string">
            <text:p text:style-name="P26"><text:s text:c="4"/>Matrix <text:s text:c="3"/>→ 1,000,000 步</text:p>
          </table:table-cell>
        </table:table-row>
        <table:table-row table:style-name="表格42.1">
          <table:table-cell table:style-name="表格42.A1" office:value-type="string">
            <text:p text:style-name="P26"><text:s text:c="4"/>Multilist → <text:s text:c="5"/>1,020 步 <text:s/>（快 1000 倍！）</text:p>
          </table:table-cell>
        </table:table-row>
      </table:table>
      <text:h text:style-name="P6" text:outline-level="1">八、考試速查表（最終記憶版）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27">主題</text:p>
          </table:table-cell>
          <table:table-cell table:style-name="表格43.A1" office:value-type="string">
            <text:p text:style-name="P28">關鍵字 / 公式</text:p>
          </table:table-cell>
          <table:table-cell table:style-name="表格43.A1" office:value-type="string">
            <text:p text:style-name="P27">補充說明</text:p>
          </table:table-cell>
        </table:table-row>
        <table:table-row table:style-name="表格43.1">
          <table:table-cell table:style-name="表格43.A2" office:value-type="string">
            <text:p text:style-name="P9">BFS</text:p>
          </table:table-cell>
          <table:table-cell table:style-name="表格43.A2" office:value-type="string">
            <text:p text:style-name="P10">Queue + FIFO</text:p>
          </table:table-cell>
          <table:table-cell table:style-name="表格43.C2" office:value-type="string">
            <text:p text:style-name="P19">B→Q；時間O(V+E)；空間O(V)；BFS 不依cost排序</text:p>
          </table:table-cell>
        </table:table-row>
        <table:table-row table:style-name="表格43.1">
          <table:table-cell table:style-name="表格43.A3" office:value-type="string">
            <text:p text:style-name="P15">DFS</text:p>
          </table:table-cell>
          <table:table-cell table:style-name="表格43.A3" office:value-type="string">
            <text:p text:style-name="P14">Stack + LIFO</text:p>
          </table:table-cell>
          <table:table-cell table:style-name="表格43.C3" office:value-type="string">
            <text:p text:style-name="P19">D→S；時間O(V+E)；空間O(V)；欲走低cost→先push高cost</text:p>
          </table:table-cell>
        </table:table-row>
        <table:table-row table:style-name="表格43.1">
          <table:table-cell table:style-name="表格43.C2" office:value-type="string">
            <text:p text:style-name="P21">Dense Graph</text:p>
          </table:table-cell>
          <table:table-cell table:style-name="表格43.A2" office:value-type="string">
            <text:p text:style-name="P10">Adjacency Matrix</text:p>
          </table:table-cell>
          <table:table-cell table:style-name="表格43.C2" office:value-type="string">
            <text:p text:style-name="P19">空間O(V²)；查邊O(1)；Degree O(n²)；1bit/格省空間</text:p>
          </table:table-cell>
        </table:table-row>
        <table:table-row table:style-name="表格43.1">
          <table:table-cell table:style-name="表格43.C3" office:value-type="string">
            <text:p text:style-name="P21">Sparse Graph</text:p>
          </table:table-cell>
          <table:table-cell table:style-name="表格43.A3" office:value-type="string">
            <text:p text:style-name="P14">List / Multilist</text:p>
          </table:table-cell>
          <table:table-cell table:style-name="表格43.C3" office:value-type="string">
            <text:p text:style-name="P19">空間O(V+E)；查邊O(degree)；Degree O(n+e)</text:p>
          </table:table-cell>
        </table:table-row>
        <table:table-row table:style-name="表格43.1">
          <table:table-cell table:style-name="表格43.C2" office:value-type="string">
            <text:p text:style-name="P21">Topological Sort</text:p>
          </table:table-cell>
          <table:table-cell table:style-name="表格43.B6" office:value-type="string">
            <text:p text:style-name="P35">in-degree=0 先出</text:p>
          </table:table-cell>
          <table:table-cell table:style-name="表格43.C2" office:value-type="string">
            <text:p text:style-name="P19">時間O(V+E)；空間O(V)；只適用 DAG；有Cycle→失敗</text:p>
          </table:table-cell>
        </table:table-row>
        <table:table-row table:style-name="表格43.1">
          <table:table-cell table:style-name="表格43.C3" office:value-type="string">
            <text:p text:style-name="P21">有 Cycle 的圖</text:p>
          </table:table-cell>
          <table:table-cell table:style-name="表格43.B7" office:value-type="string">
            <text:p text:style-name="P30">無法 Topological Sort</text:p>
          </table:table-cell>
          <table:table-cell table:style-name="表格43.C3" office:value-type="string">
            <text:p text:style-name="P19">所有點 in-degree&gt;0，Queue 永遠空</text:p>
          </table:table-cell>
        </table:table-row>
        <text:soft-page-break/>
        <table:table-row table:style-name="表格43.1">
          <table:table-cell table:style-name="表格43.C2" office:value-type="string">
            <text:p text:style-name="P21">Prim + Matrix</text:p>
          </table:table-cell>
          <table:table-cell table:style-name="表格43.A2" office:value-type="string">
            <text:p text:style-name="P10">O(V²)</text:p>
          </table:table-cell>
          <table:table-cell table:style-name="表格43.C2" office:value-type="string">
            <text:p text:style-name="P19">每輪掃描 V 個頂點找最小 × V 輪</text:p>
          </table:table-cell>
        </table:table-row>
        <table:table-row table:style-name="表格43.1">
          <table:table-cell table:style-name="表格43.C3" office:value-type="string">
            <text:p text:style-name="P21">Prim + Heap</text:p>
          </table:table-cell>
          <table:table-cell table:style-name="表格43.A3" office:value-type="string">
            <text:p text:style-name="P14">O(E log V)</text:p>
          </table:table-cell>
          <table:table-cell table:style-name="表格43.C3" office:value-type="string">
            <text:p text:style-name="P19">每條邊 O(log V)；共 E 條邊</text:p>
          </table:table-cell>
        </table:table-row>
        <table:table-row table:style-name="表格43.1">
          <table:table-cell table:style-name="表格43.C2" office:value-type="string">
            <text:p text:style-name="P21">Multilist 邊儲存</text:p>
          </table:table-cell>
          <table:table-cell table:style-name="表格43.B10" office:value-type="string">
            <text:p text:style-name="P32">每條邊只存一次</text:p>
          </table:table-cell>
          <table:table-cell table:style-name="表格43.C2" office:value-type="string">
            <text:p text:style-name="P19">List 存兩次；Multilist 用 link1/link2 兩端共用</text:p>
          </table:table-cell>
        </table:table-row>
      </table:table>
      <text:p text:style-name="P1"/>
      <text:h text:style-name="P6" text:outline-level="1">九、常見申論題標準答案</text:h>
      <text:p text:style-name="P16">◆ Q1：為什麼 Adjacency Multilist 比 Adjacency List 節省空間？</text:p>
      <text:p text:style-name="P29">標準答案</text:p>
      <text:p text:style-name="P18">Adjacency List 在無向圖中，同一條邊需在兩個頂點的串列各存一次（A→B 與 B→A 分別存放），V 個頂點 E 條邊共需 V+2E 個節點。Adjacency Multilist 每條邊只建立一個 Edge 節點 [V1, V2, link1, link2]，由兩端頂點透過 link1/link2 共同指向，只需 V+E 個節點，節省了 E 個節點的空間，且修改一條邊只需更新一個節點。</text:p>
      <text:p text:style-name="P1"/>
      <text:p text:style-name="P16">◆ Q2：為什麼有 Cycle 的圖無法進行 Topological Sort？</text:p>
      <text:p text:style-name="P29">標準答案</text:p>
      <text:p text:style-name="P18">Kahn's Algorithm 依靠「找 in-degree=0 的頂點」作為起始。在含 Cycle 的圖中（如 A→B→C→A），Cycle 上每個頂點都有至少一條邊指向它，所有頂點的 in-degree≥1，沒有任何頂點能被選出，演算法結束時輸出頂點數 &lt; V，即代表存在 Cycle，無法完成拓樸排序。</text:p>
      <text:p text:style-name="P1"/>
      <text:p text:style-name="P16">◆ Q3：比較 Prim 使用矩陣 O(V²) 與使用 Heap O(E log V) 的原因</text:p>
      <text:p text:style-name="P29">標準答案</text:p>
      <text:p text:style-name="P18">使用 Adjacency Matrix：維護 dist[] 陣列，每輪需掃描全部 V 個頂點找最小距離（O(V)），更新鄰居也需掃描矩陣第 u 列（O(V)），共執行 V 輪，故總時間 O(V²)。適合稠密圖。</text:p>
      <text:p text:style-name="P18">使用 Binary Heap：用 Priority Queue 維護候選邊，extract-min 為 O(log V)，每條邊最多被插入 Heap 一次（O(log V)），共 E 條邊，故總時間 O(E log V)。適合稀疏圖。</text:p>
      <text:p text:style-name="P1"/>
      <text:p text:style-name="P16">◆ Q4：Matrix 計算所有 Degree 為 O(n²) vs Multilist 為 O(n+e) 的原因</text:p>
      <text:p text:style-name="P29">標準答案</text:p>
      <text:p text:style-name="P18">Matrix：計算頂點 v 的 Degree 需掃描第 v 列 n 個格子（O(n)）；計算全部 n 個頂點共 n×O(n)=O(n²)，即使大部分格子是 0 也必須掃描。</text:p>
      <text:p text:style-name="P18">Multilist：每個 Edge 節點恰好被走訪兩次（V1 端與 V2 端各一次），加上走訪 n 個頂點起始指標，共 n+2e 步 = O(n+e)，完全不浪費在「不存在的邊」上。</text:p>
      <text:p text:style-name="P1"/>
      <text:p text:style-name="P22">本筆記整合圖片原始內容 + 逐步圖解 + 複雜度完整推導，適合準備台灣資訊類公職考試使用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51</meta:editing-cycles>
    <meta:creation-date>2026-06-08T00:34:27.773000000</meta:creation-date>
    <dc:date>2026-06-08T17:24:59.686000000</dc:date>
    <meta:editing-duration>PT8H47M6S</meta:editing-duration>
    <meta:generator>MODA_ODF_Application_Tools/3.8.4.2$Windows_X86_64 LibreOffice_project/4fb77107d5af14329e08085efe4fa19b5633383a</meta:generator>
    <meta:document-statistic meta:table-count="51" meta:image-count="0" meta:object-count="0" meta:page-count="19" meta:paragraph-count="741" meta:word-count="7247" meta:character-count="16095" meta:non-whitespace-character-count="11546"/>
  </office:meta>
</office:document-meta>
</file>