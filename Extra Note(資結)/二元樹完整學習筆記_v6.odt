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" style:family="paragraph" style:parent-style-name="Standard">
      <style:paragraph-properties fo:margin-top="0.088cm" fo:margin-bottom="0.088cm" style:contextual-spacing="false"/>
    </style:style>
    <style:style style:name="P7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8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9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0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2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18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9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2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26" style:family="paragraph" style:parent-style-name="Standard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13f42e" fo:background-color="#64ffda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28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29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31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35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9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4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4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4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45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46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48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49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51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2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text-properties officeooo:paragraph-rsid="00529de2"/>
    </style:style>
    <style:style style:name="P5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59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60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6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6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65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66" style:family="paragraph" style:parent-style-name="Standard">
      <style:text-properties officeooo:paragraph-rsid="00549b67"/>
    </style:style>
    <style:style style:name="P67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8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0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72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74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75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7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89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9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92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4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9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96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97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98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99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04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105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7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08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0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10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1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14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16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17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1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119" style:family="paragraph" style:parent-style-name="Standard">
      <style:text-properties officeooo:paragraph-rsid="00d1b50e"/>
    </style:style>
    <style:style style:name="P120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21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2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12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25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2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27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28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2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3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31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13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134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7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8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9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40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1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2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44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49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5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5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5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5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54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55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6" style:family="paragraph" style:parent-style-name="Heading_20_2">
      <style:paragraph-properties fo:margin-top="0.423cm" fo:margin-bottom="0.212cm" style:contextual-spacing="false"/>
    </style:style>
    <style:style style:name="P157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158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1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2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3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65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6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T1" style:family="text">
      <style:text-properties fo:background-color="#76ff03" loext:char-shading-value="0"/>
    </style:style>
    <style:style style:name="T2" style:family="text">
      <style:text-properties fo:background-color="#18ffff" loext:char-shading-value="0"/>
    </style:style>
    <style:style style:name="T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5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3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4" style:family="text">
      <style:text-properties fo:background-color="#ffd740" loext:char-shading-value="0"/>
    </style:style>
    <style:style style:name="T15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16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8" style:family="text">
      <style:text-properties fo:background-color="#d500f9" loext:char-shading-value="0"/>
    </style:style>
    <style:style style:name="T19" style:family="text">
      <style:text-properties fo:font-weight="bold" fo:background-color="#eeff41" loext:char-shading-value="0" style:font-weight-asian="bold" style:font-weight-complex="bold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fo:background-color="#ffd74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3" style:family="text">
      <style:text-properties fo:color="#18ffff" loext:opacity="100%" fo:background-color="#d500f9" loext:char-shading-value="0"/>
    </style:style>
    <style:style style:name="T24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26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2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9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30" style:family="text">
      <style:text-properties fo:font-weight="bold" fo:background-color="#18ffff" loext:char-shading-value="0" style:font-weight-asian="bold" style:font-weight-complex="bold"/>
    </style:style>
    <style:style style:name="T3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3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34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35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36" style:family="text">
      <style:text-properties fo:background-color="#eeff41" loext:char-shading-value="0"/>
    </style:style>
    <style:style style:name="T37" style:family="text">
      <style:text-properties fo:font-weight="bold" fo:background-color="#00e676" loext:char-shading-value="0" style:font-weight-asian="bold" style:font-weight-complex="bold"/>
    </style:style>
    <style:style style:name="T38" style:family="text">
      <style:text-properties fo:background-color="#ffc400" loext:char-shading-value="0"/>
    </style:style>
    <style:style style:name="T39" style:family="text">
      <style:text-properties fo:background-color="#64ffda" loext:char-shading-value="0"/>
    </style:style>
    <style:style style:name="T40" style:family="text">
      <style:text-properties fo:background-color="#ff4081" loext:char-shading-value="0"/>
    </style:style>
    <style:style style:name="T41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42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43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44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45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46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47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49" style:family="text">
      <style:text-properties fo:background-color="#ff5252" loext:char-shading-value="0"/>
    </style:style>
    <style:style style:name="T50" style:family="text">
      <style:text-properties officeooo:rsid="00dcd50c" fo:background-color="#ff5252" loext:char-shading-value="0"/>
    </style:style>
    <style:style style:name="T51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53" style:family="text">
      <style:text-properties fo:color="#eeff41" loext:opacity="100%" fo:background-color="#f50057" loext:char-shading-value="0"/>
    </style:style>
    <style:style style:name="T54" style:family="text">
      <style:text-properties fo:background-color="#00e676" loext:char-shading-value="0"/>
    </style:style>
    <style:style style:name="T5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56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7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58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59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60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61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62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63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64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65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66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二元樹（Binary Tree）</text:p>
      <text:p text:style-name="P3">完整學習筆記 — 超白話版</text:p>
      <text:p text:style-name="P4">含考場公式、考題解析、錯誤糾正、動畫級說明</text:p>
      <text:p text:style-name="P1"/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📌 本筆記適用範圍</text:p>
            <text:p text:style-name="P5"><text:s text:c="3"/>✔ 公職考試（高考 / 普考 / 各類特考）</text:p>
            <text:p text:style-name="P5"><text:s text:c="3"/>✔ 大學資料結構期末考</text:p>
            <text:p text:style-name="P5"><text:s text:c="3"/>✔ 從零開始學二元樹的讀者</text:p>
            <text:p text:style-name="P6"/>
            <text:p text:style-name="P5">📌 本筆記涵蓋</text:p>
            <text:p text:style-name="P5"><text:s text:c="3"/>✔ 圖片原始考試筆記逐行拆解與錯誤修正</text:p>
            <text:p text:style-name="P5"><text:s text:c="3"/>✔ 113 Q1、114 Q1、115 Q2、113 Q4 歷屆考題詳解</text:p>
            <text:p text:style-name="P5"><text:s text:c="3"/>✔ 所有公式推導（不跳步）</text:p>
            <text:p text:style-name="P5"><text:s text:c="3"/>✔ DFS（前序、中序、後序） ＋ BFS 完整說明</text:p>
            <text:p text:style-name="P5"><text:s text:c="3"/>✔ Heap、Priority Queue、陣列表示法</text:p>
            <text:p text:style-name="P5"><text:s text:c="3"/>✔ 唯一重建樹的完整步驟</text:p>
          </table:table-cell>
        </table:table-row>
      </table:table>
      <text:p text:style-name="P1"/>
      <text:p text:style-name="P1"/>
      <text:p text:style-name="Standard"/>
      <text:h text:style-name="P7" text:outline-level="1">第一章：從零開始 — 什麼是「樹」？</text:h>
      <text:p text:style-name="P8">在學任何公式之前，先把樹的形狀刻進腦子裡。</text:p>
      <text:h text:style-name="P9" text:outline-level="2">1.1 現實生活比喻</text:h>
      <text:p text:style-name="P8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 text:c="9"/>爸爸 (root)</text:p>
            <text:p text:style-name="P10"><text:s text:c="8"/>/ <text:s text:c="4"/>\</text:p>
            <text:p text:style-name="P10"><text:s text:c="6"/>哥哥 <text:s text:c="4"/>姐姐</text:p>
            <text:p text:style-name="P10"><text:s text:c="6"/>/ <text:s/>\</text:p>
            <text:p text:style-name="P10"><text:s text:c="3"/>小明 <text:s/>小華</text:p>
          </table:table-cell>
        </table:table-row>
      </table:table>
      <text:p text:style-name="P8">這就是一棵樹。電腦科學裡的樹是倒過來的：根在最上面，葉子在最下面。</text:p>
      <text:p text:style-name="P1"/>
      <text:h text:style-name="P9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1">名詞（英文）</text:p>
            <text:p text:style-name="P11">root（根節點）</text:p>
            <text:p text:style-name="P11">child（子節點）</text:p>
            <text:p text:style-name="P11">parent（父節點）</text:p>
            <text:p text:style-name="P11">leaf（葉節點）</text:p>
            <text:p text:style-name="P12">degree（度數）</text:p>
            <text:p text:style-name="P11">edge / branch（邊）</text:p>
            <text:p text:style-name="P11">internal node（內部節點）</text:p>
            <text:p text:style-name="P11">subtree（子樹）</text:p>
            <text:p text:style-name="P11">forest（森林）</text:p>
          </table:table-cell>
          <table:table-cell table:style-name="表格3.B1" office:value-type="string">
            <text:p text:style-name="P11">說明</text:p>
            <text:p text:style-name="P13">最頂端的節點，只有一個</text:p>
            <text:p text:style-name="P13">往下連接的節點</text:p>
            <text:p text:style-name="P13">往上連接的節點</text:p>
            <text:p text:style-name="P13">degree = 0，沒有 child 的節點</text:p>
            <text:p text:style-name="P13"><text:span text:style-name="T1">一個節點有幾個 child</text:span>（<text:span text:style-name="T2">二元樹最多 = 2</text:span>）</text:p>
            <text:p text:style-name="P13">連接兩個節點的線；n 個節點 ⇒ n−1 條邊</text:p>
            <text:p text:style-name="P13">degree ≥ 1，還有子節點</text:p>
            <text:p text:style-name="P13">以任意節點為 root 往下看，本身也是一棵樹</text:p>
            <text:p text:style-name="P13">多棵樹放在一起就是森林</text:p>
          </table:table-cell>
        </table:table-row>
      </table:table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4">⚠️ 重要：樹沒有環（Cycle）！</text:p>
            <text:p text:style-name="P14">若節點 A → B → C → A（繞回去），那就不叫樹，叫圖（Graph）。</text:p>
            <text:p text:style-name="P14">Tree 的定義：n 個節點、n−1 條邊、無環、連通。</text:p>
          </table:table-cell>
        </table:table-row>
      </table:table>
      <text:p text:style-name="Standard"/>
      <text:h text:style-name="P7" text:outline-level="1">第二章：Binary Tree（二元樹）</text:h>
      <text:h text:style-name="P9" text:outline-level="2">2.1 定義</text:h>
      <text:p text:style-name="P8"><text:span text:style-name="T3">每個節點最多只能有「兩個」子節點</text:span>：<text:span text:style-name="T4">左子節點（left child）</text:span>和<text:span text:style-name="T5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15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0"><text:s text:c="4"/>A</text:p>
                  <text:p text:style-name="P10"><text:s text:c="3"/>/ \</text:p>
                  <text:p text:style-name="P10"><text:s text:c="2"/>B <text:s text:c="2"/>C</text:p>
                  <text:p text:style-name="P10"><text:s text:c="3"/>\</text:p>
                  <text:p text:style-name="P10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16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0"><text:s text:c="4"/>A</text:p>
                  <text:p text:style-name="P10"><text:s/>/ | \</text:p>
                  <text:p text:style-name="P10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"/>
      <text:h text:style-name="P9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">公式1：分支數（branch）= n − 1</text:p>
            <text:p text:style-name="P5"><text:s text:c="2"/>→<text:span text:style-name="T6"> n 個節點</text:span>的二元樹，共有 <text:span text:style-name="T5">n−1 條邊</text:span></text:p>
            <text:p text:style-name="P6"/>
            <text:p text:style-name="P5">公式2：<text:span text:style-name="T7">葉節點（n0） = 度數為2的節點（n2） + 1</text:span></text:p>
            <text:p text:style-name="P5"><text:s text:c="2"/>→ n0 = n2 + 1 <text:s text:c="2"/>← 圖片原始考試筆記中隱含的超重要公式！</text:p>
            <text:p text:style-name="P6"/>
            <text:p text:style-name="P5">公式3：Full Binary Tree（滿二元樹）最大節點數 = 2^h − 1</text:p>
            <text:p text:style-name="P5"><text:s text:c="2"/>→ 高度 h 時，每層全滿</text:p>
            <text:p text:style-name="P6"/>
            <text:p text:style-name="P5">公式4：2^(h−1) ≤ n ≤ 2^h − 1</text:p>
            <text:p text:style-name="P5"><text:s text:c="2"/>→ 高度 h 的二元樹，節點數範圍</text:p>
          </table:table-cell>
        </table:table-row>
      </table:table>
      <text:p text:style-name="P1"/>
      <text:h text:style-name="P9" text:outline-level="2">2.3 公式2 的推導（n0 = n2 + 1）</text:h>
      <text:p text:style-name="P17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8">這個公式的意思是：</text:p>
            <text:p text:style-name="P18">「葉節點的數量」永遠等於「有兩個小孩的節點數量」加 1。</text:p>
            <text:p text:style-name="P19"/>
            <text:p text:style-name="P18">公式本身只有一行： <text:s/>n₀ = n₂ + 1</text:p>
            <text:p text:style-name="P18">但直接背沒有用——考試會換各種方向問，所以要真正懂推導過程。</text:p>
          </table:table-cell>
        </table:table-row>
      </table:table>
      <text:p text:style-name="P17"/>
      <text:p text:style-name="P20">第一步：先把 degree（度數）看懂</text:p>
      <text:p text:style-name="P21"><text:span text:style-name="T8">degree = 一個節點有幾個小孩（child）</text:span>。二元樹最多 2 個。</text:p>
      <text:p text:style-name="P21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2"><text:s text:c="8"/>A <text:s text:c="7"/>← degree(A) = 2 <text:s text:c="2"/>（有 B、C 兩個小孩）</text:p>
            <text:p text:style-name="P22"><text:s text:c="7"/>/ \</text:p>
            <text:p text:style-name="P23"><text:soft-page-break/><text:span text:style-name="T9"><text:s text:c="6"/>B <text:s text:c="2"/>C <text:s text:c="5"/>← degree(C) = 0 <text:s text:c="2"/>（沒小孩，是葉子）</text:span></text:p>
            <text:p text:style-name="P22"><text:s text:c="5"/>/</text:p>
            <text:p text:style-name="P22"><text:s text:c="4"/>D <text:s text:c="11"/>← degree(B) = 1 <text:s text:c="2"/>（只有 D 一個小孩）</text:p>
            <text:p text:style-name="P22"><text:s text:c="17"/>← degree(D) = 0 <text:s text:c="2"/>（沒小孩，是葉子）</text:p>
          </table:table-cell>
        </table:table-row>
      </table:table>
      <text:p text:style-name="P17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24">定義</text:p>
          </table:table-cell>
          <table:table-cell table:style-name="表格57.B1" office:value-type="string">
            <text:p text:style-name="P25"><text:span text:style-name="T10">n₀ <text:s/>= degree 為 0 的節點數</text:span> <text:s/>→ 葉節點（Leaf）</text:p>
            <text:p text:style-name="P25"><text:span text:style-name="T6">n₁ <text:s/>= degree 為 1 的節點數</text:span> <text:s/>→ 只有一個小孩的節點</text:p>
            <text:p text:style-name="P25"><text:span text:style-name="T5">n₂ <text:s/>= degree 為 2 的節點數</text:span> <text:s/>→ 有兩個小孩的節點</text:p>
          </table:table-cell>
        </table:table-row>
      </table:table>
      <text:p text:style-name="P17"/>
      <text:p text:style-name="P21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2"><text:s text:c="2"/>n₀ = 2 <text:s/>（<text:span text:style-name="T11">C 和 D 是葉子</text:span>）</text:p>
            <text:p text:style-name="P22"><text:s text:c="2"/>n₁ = 1 <text:s/>（<text:span text:style-name="T11">B 只有一個小孩</text:span>）</text:p>
            <text:p text:style-name="P22"><text:s text:c="2"/>n₂ = 1 <text:s/>（<text:span text:style-name="T11">A 有兩個小孩</text:span>）</text:p>
            <text:p text:style-name="P22"><text:s text:c="2"/>驗證：n₀ = n₂ + 1 <text:s/>→ <text:s/>2 = 1 + 1 <text:s/>✔</text:p>
          </table:table-cell>
        </table:table-row>
      </table:table>
      <text:p text:style-name="P17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24">步驟 1</text:p>
          </table:table-cell>
          <table:table-cell table:style-name="表格59.B1" office:value-type="string">
            <text:p text:style-name="P25"><text:span text:style-name="T8">總節點數 = 三種度數節點加起來</text:span>：</text:p>
            <text:p text:style-name="P26">n <text:s/>= <text:s/>n₀ + n₁ + n₂</text:p>
          </table:table-cell>
        </table:table-row>
      </table:table>
      <text:p text:style-name="P17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24">步驟 2</text:p>
          </table:table-cell>
          <table:table-cell table:style-name="表格60.B1" office:value-type="string">
            <text:p text:style-name="P25">從「節點個數」看邊數：</text:p>
            <text:p text:style-name="P19"/>
            <text:p text:style-name="P25">樹有一個性質：<text:span text:style-name="T12">n 個節點，一定有 n−1 條邊</text:span>。</text:p>
            <text:p text:style-name="P25">（因為<text:span text:style-name="T6">每條邊都連著一個被連過來的節點</text:span>，<text:span text:style-name="T13">除了 root 每個人都有一條邊連著自己</text:span>）</text:p>
            <text:p text:style-name="P19"/>
            <text:p text:style-name="P27"><text:s text:c="2"/>▶ <text:span text:style-name="T14">邊數 <text:s/>= <text:s/>n(</text:span><text:span text:style-name="T15">n 個節點</text:span><text:span text:style-name="T14">) − 1 </text:span><text:s text:c="8"/>← 第一個邊數公式</text:p>
          </table:table-cell>
        </table:table-row>
      </table:table>
      <text:p text:style-name="P17"/>
      <text:p text:style-name="P21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2"><text:s text:c="2"/>1 個節點 <text:s/>→ <text:s/>0 條邊 <text:s text:c="3"/>(1 - 1 = 0) ✔</text:p>
            <text:p text:style-name="P22"><text:s text:c="2"/>2 個節點 <text:s/>→ <text:s/>1 條邊 <text:s text:c="3"/>(2 - 1 = 1) ✔</text:p>
            <text:p text:style-name="P22"><text:s text:c="2"/>4 個節點 <text:s/>→ <text:s/>3 條邊 <text:s text:c="3"/>(4 - 1 = 3) ✔</text:p>
          </table:table-cell>
        </table:table-row>
      </table:table>
      <text:p text:style-name="P17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24">步驟 3</text:p>
          </table:table-cell>
          <table:table-cell table:style-name="表格62.B1" office:value-type="string">
            <text:p text:style-name="P25">從「<text:span text:style-name="T3">每個節點往下伸出幾條線</text:span>」<text:span text:style-name="T16">看邊數</text:span>：</text:p>
            <text:p text:style-name="P19"/>
            <text:p text:style-name="P25">換個角度——<text:span text:style-name="T17">每個節點都可以向下「貢獻」它的子邊</text:span>：</text:p>
            <text:p text:style-name="P25"><text:s text:c="2"/>• degree = 0 的節點（葉子） <text:s text:c="2"/>→ 貢獻 <text:s/>0 <text:s/>條邊</text:p>
            <text:p text:style-name="P25"><text:s text:c="2"/>• degree = 1 的節點 <text:s text:c="10"/>→ 貢獻 <text:s/>1 <text:s/>條邊</text:p>
            <text:p text:style-name="P25"><text:s text:c="2"/>• degree = 2 的節點 <text:s text:c="10"/>→ 貢獻 <text:s/>2 <text:s/>條邊</text:p>
            <text:p text:style-name="P19"/>
            <text:p text:style-name="P25"><text:span text:style-name="T8">把全部節點的貢獻加起來，就是樹的總邊數</text:span>：</text:p>
            <text:p text:style-name="P19"><text:soft-page-break/></text:p>
            <text:p text:style-name="P25"><text:s text:c="2"/>▶ <text:span text:style-name="T12">邊數</text:span> <text:s/>= <text:s/><text:span text:style-name="T12">0</text:span>×n₀ <text:s/>+ <text:s/><text:span text:style-name="T12">1</text:span>×n₁ <text:s/>+ <text:s/><text:span text:style-name="T12">2</text:span>×n₂ <text:s text:c="2"/>← 第二個邊數公式</text:p>
          </table:table-cell>
        </table:table-row>
      </table:table>
      <text:p text:style-name="P17"/>
      <text:p text:style-name="P21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2"><text:s text:c="2"/>A 有兩個小孩 B、C <text:s/>→ <text:s/>A 往下伸出 2 條線</text:p>
            <text:p text:style-name="P22"><text:s text:c="2"/>┌─── A ───┐</text:p>
            <text:p text:style-name="P22"><text:s text:c="2"/>│ <text:s text:c="8"/>│</text:p>
            <text:p text:style-name="P22"><text:s text:c="2"/>B <text:s text:c="8"/>C <text:s text:c="3"/>← A 貢獻了 2 條邊（A→B、A→C）</text:p>
            <text:p text:style-name="P23"/>
            <text:p text:style-name="P22"><text:s text:c="2"/>B 有一個小孩 D <text:s/>→ <text:s/>B 往下伸出 1 條線</text:p>
            <text:p text:style-name="P22"><text:s text:c="2"/>B</text:p>
            <text:p text:style-name="P22"><text:s text:c="2"/>│</text:p>
            <text:p text:style-name="P22"><text:s text:c="2"/>D <text:s text:c="13"/>← B 貢獻了 1 條邊（B→D）</text:p>
            <text:p text:style-name="P23"/>
            <text:p text:style-name="P22"><text:s text:c="2"/>C、D 沒有小孩 <text:s/>→ <text:s/>各貢獻 0 條邊</text:p>
            <text:p text:style-name="P23"/>
            <text:p text:style-name="P22"><text:s text:c="2"/>全部加起來：2 + 1 + 0 + 0 = 3 條邊 <text:s/>= <text:s/>n−1 = 4−1 = 3 <text:s/>✔</text:p>
          </table:table-cell>
        </table:table-row>
      </table:table>
      <text:p text:style-name="P17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24">步驟 4</text:p>
          </table:table-cell>
          <table:table-cell table:style-name="表格64.B1" office:value-type="string">
            <text:p text:style-name="P25">兩個邊數公式算的是同一件事，所以畫等號：</text:p>
            <text:p text:style-name="P28"/>
            <text:p text:style-name="P25"><text:s/><text:span text:style-name="T18"><text:s/></text:span><text:span text:style-name="T8">n − 1 <text:s/>= <text:s/>0×n₀ <text:s/>+ <text:s/>1×n₁ <text:s/>+ <text:s/>2×n₂</text:span></text:p>
            <text:p text:style-name="P19"/>
            <text:p text:style-name="P25">把 n = n₀ + n₁ + n₂ 代入左邊：</text:p>
            <text:p text:style-name="P19"/>
            <text:p text:style-name="P25"><text:s text:c="2"/>n₀ + n₁ + n₂ − 1 <text:s/>= <text:s/>n₁ + 2n₂</text:p>
          </table:table-cell>
        </table:table-row>
      </table:table>
      <text:p text:style-name="P17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24">步驟 5</text:p>
          </table:table-cell>
          <table:table-cell table:style-name="表格65.B1" office:value-type="string">
            <text:p text:style-name="P25">整理數學式（兩邊同時消去 n₁）：</text:p>
            <text:p text:style-name="P19"/>
            <text:p text:style-name="P25"><text:s text:c="2"/>n₀ + n₁ + n₂ − 1 <text:s/>= <text:s/>n₁ + 2n₂</text:p>
            <text:p text:style-name="P25"><text:s text:c="2"/>↓ <text:s/>兩邊減去 n₁</text:p>
            <text:p text:style-name="P25"><text:s text:c="2"/>n₀ + n₂ − 1 <text:s/>= <text:s/>2n₂</text:p>
            <text:p text:style-name="P25"><text:s text:c="2"/>↓ <text:s/>移項</text:p>
            <text:p text:style-name="P25"><text:s text:c="2"/>n₀ <text:s/>= <text:s/>2n₂ − n₂ + 1 <text:s/>= <text:s/>n₂ + 1</text:p>
            <text:p text:style-name="P19"/>
            <text:p text:style-name="P25"><text:s text:c="2"/>▶ <text:s/>n₀ = n₂ + 1 <text:s text:c="3"/>✔ 得證！</text:p>
          </table:table-cell>
        </table:table-row>
      </table:table>
      <text:p text:style-name="P17"/>
      <text:p text:style-name="P2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29">定義</text:p>
          </table:table-cell>
          <table:table-cell table:style-name="表格66.B1" office:value-type="string">
            <text:p text:style-name="P30"><text:span text:style-name="T19">n₀ = 葉節點數</text:span>；<text:span text:style-name="T20">n₁ = degree-1 節點數</text:span>；<text:span text:style-name="T21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29">步驟1</text:p>
          </table:table-cell>
          <table:table-cell table:style-name="表格66.B2" office:value-type="string">
            <text:p text:style-name="P31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29">步驟2</text:p>
          </table:table-cell>
          <table:table-cell table:style-name="表格66.B3" office:value-type="string">
            <text:p text:style-name="P30"><text:span text:style-name="T22">邊數 = n − 1</text:span>（<text:span text:style-name="T5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29">步驟3</text:p>
          </table:table-cell>
          <table:table-cell table:style-name="表格66.B4" office:value-type="string">
            <text:p text:style-name="P30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29">步驟4</text:p>
          </table:table-cell>
          <table:table-cell table:style-name="表格66.B5" office:value-type="string">
            <text:p text:style-name="P30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29">步驟5</text:p>
          </table:table-cell>
          <table:table-cell table:style-name="表格66.B6" office:value-type="string">
            <text:p text:style-name="P30">消去 n₁ 後移項：<text:span text:style-name="T8">n₀ = n₂ + 1</text:span> <text:s/>✔</text:p>
          </table:table-cell>
        </table:table-row>
      </table:table>
      <text:p text:style-name="P17"/>
      <text:p text:style-name="P2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2">題型：某二元樹<text:span text:style-name="T11">有 20 個 degree=2 的節點</text:span>，請問<text:span text:style-name="T14">有幾個葉節點</text:span>？</text:p>
            <text:p text:style-name="P19"/>
            <text:p text:style-name="P32"><text:s text:c="2"/>直接套公式：n₀ = n₂ + 1 = 20 + 1 = 21 個</text:p>
            <text:p text:style-name="P19"/>
            <text:p text:style-name="P32">反過來也可以：若已知葉節點 15 個，則 degree=2 的節點有 15 − 1 = 14 個</text:p>
          </table:table-cell>
        </table:table-row>
      </table:table>
      <text:p text:style-name="P1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3">⚠️ <text:span text:style-name="T16">此公式僅適用於 Binary Tree（二元樹）！</text:span></text:p>
            <text:p text:style-name="P19"/>
            <text:p text:style-name="P33">因為二元樹的 degree 最多為 2，只有 n₀、n₁、n₂ 三種情況。</text:p>
            <text:p text:style-name="P33">若是一般樹（degree 可以是 3、4、5…），這個推導就不成立，必須重新列方程式。</text:p>
          </table:table-cell>
        </table:table-row>
      </table:table>
      <text:h text:style-name="P34" text:outline-level="2"/>
      <text:p text:style-name="P1"/>
      <text:h text:style-name="P9" text:outline-level="2">2.4 公式3 的推導（<text:span text:style-name="T23">2^h − 1</text:span>）</text:h>
      <text:p text:style-name="P8"><text:span text:style-name="T6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>第1層：1 = 2^0</text:p>
            <text:p text:style-name="P10">第2層：2 = 2^1</text:p>
            <text:p text:style-name="P10">第3層：4 = 2^2</text:p>
            <text:p text:style-name="P10"><text:s text:c="2"/>...</text:p>
            <text:p text:style-name="P10">第h層：2^(h-1)</text:p>
            <text:p text:style-name="P35">總和 <text:s/>= 1 + 2 + 4 + ... + 2^(h-1) = <text:span text:style-name="T8">2^h − 1 </text:span><text:span text:style-name="T24">(Full Binary Tree（滿二元樹）</text:span><text:span text:style-name="T25">最大節點數 = 2^h − 1</text:span><text:span text:style-name="T24"> → </text:span><text:span text:style-name="T26">高度 h 時，每層全滿</text:span><text:span text:style-name="T24">)</text:span></text:p>
          </table:table-cell>
        </table:table-row>
      </table:table>
      <text:p text:style-name="P1"/>
      <text:h text:style-name="P9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>⚠️ 高度定義有兩種，考試務必看清楚題目！</text:p>
            <text:p text:style-name="P6"/>
            <text:p text:style-name="P14"><text:span text:style-name="T20">定義一：root 算第 1 層</text:span> → 只有 root 的樹，高度 = 1</text:p>
            <text:p text:style-name="P14"><text:span text:style-name="T20">定義二：root 算第 0 層</text:span> → 只有 root 的樹，高度 = 0</text:p>
            <text:p text:style-name="P6"/>
            <text:p text:style-name="P14">兩種定義差 1，公式結果會不同！</text:p>
          </table:table-cell>
        </table:table-row>
      </table:table>
      <text:p text:style-name="Standard"/>
      <text:h text:style-name="P7" text:outline-level="1">第三章：Binary Search Tree（BST，二元搜尋樹）</text:h>
      <text:h text:style-name="P9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左子樹的所有值 &lt; 根節點值 &lt; 右子樹的所有值</text:p>
            <text:p text:style-name="P37">（<text:span text:style-name="T8">左小、根中、右大</text:span>）</text:p>
          </table:table-cell>
        </table:table-row>
      </table:table>
      <text:p text:style-name="P1"/>
      <text:h text:style-name="P9" text:outline-level="2">3.2 BST 插入範例</text:h>
      <text:p text:style-name="P8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>插入 50： <text:s text:c="10"/>插入 30（&lt;50 往左）： <text:s text:c="2"/>插入 80（&gt;50 往右）：</text:p>
            <text:p text:style-name="P10"><text:s text:c="3"/>50 <text:s text:c="18"/>50 <text:s text:c="20"/>50</text:p>
            <text:p text:style-name="P10"><text:s text:c="23"/>/ <text:s text:c="21"/>/ <text:s/>\</text:p>
            <text:p text:style-name="P10"><text:s text:c="22"/>30 <text:s text:c="19"/>30 <text:s text:c="3"/>80</text:p>
            <text:p text:style-name="P1"/>
            <text:p text:style-name="P10">插入 40（&gt;30 往右）： <text:s/>插入 20（&lt;30 往左）： <text:s/>插入 60（&gt;50 但&lt;80）：</text:p>
            <text:p text:style-name="P10"><text:s text:c="6"/>50 <text:s text:c="18"/>50 <text:s text:c="19"/>50</text:p>
            <text:p text:style-name="P10"><text:s text:c="5"/>/ <text:s/>\ <text:s text:c="16"/>/ <text:s/>\ <text:s text:c="16"/>/ <text:s/>\</text:p>
            <text:p text:style-name="P10"><text:s text:c="3"/>30 <text:s text:c="3"/>80 <text:s text:c="13"/>30 <text:s text:c="3"/>80 <text:s text:c="12"/>30 <text:s text:c="3"/>80</text:p>
            <text:p text:style-name="P10"><text:s text:c="5"/>\ <text:s text:c="17"/>/ \ <text:s text:c="17"/>/ \ <text:s text:c="2"/>/</text:p>
            <text:p text:style-name="P10"><text:s text:c="5"/>40 <text:s text:c="15"/>20 <text:s/>40 <text:s text:c="13"/>20 <text:s/>40 60</text:p>
          </table:table-cell>
        </table:table-row>
      </table:table>
      <text:p text:style-name="P1"/>
      <text:h text:style-name="P9" text:outline-level="2">3.3 BST 刪除（三種情況）</text:h>
      <text:p text:style-name="P38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>刪除 20：直接移除，父節點的 left 指向 NULL</text:p>
          </table:table-cell>
        </table:table-row>
      </table:table>
      <text:p text:style-name="P38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0">刪除 30（只有右子樹 40）：</text:p>
            <text:p text:style-name="P10"><text:s text:c="3"/>50 <text:s text:c="15"/>50</text:p>
            <text:p text:style-name="P10"><text:s text:c="2"/>/ <text:s/>\ <text:s text:c="6"/>→ <text:s text:c="5"/>/ <text:s/>\</text:p>
            <text:p text:style-name="P10">30 <text:s text:c="3"/>80 <text:s text:c="11"/>40 <text:s text:c="2"/>80</text:p>
            <text:p text:style-name="P10"><text:s text:c="2"/>\</text:p>
            <text:p text:style-name="P10"><text:s text:c="2"/>40</text:p>
          </table:table-cell>
        </table:table-row>
      </table:table>
      <text:p text:style-name="P38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0">刪除 50（有左右子樹）：</text:p>
            <text:p text:style-name="P10">方法一：<text:span text:style-name="T27">找右子樹最小值（60）來取代 50</text:span></text:p>
            <text:p text:style-name="P10">方法二：<text:span text:style-name="T28">找左子樹最大值（40）來取代 50</text:span></text:p>
            <text:p text:style-name="P1"/>
            <text:p text:style-name="P10">以方法一為例：</text:p>
            <text:p text:style-name="P10"><text:s text:c="7"/>50 <text:s text:c="18"/>60</text:p>
            <text:p text:style-name="P10"><text:s text:c="6"/>/ <text:s/>\ <text:s text:c="7"/>→ <text:s text:c="7"/>/ <text:s/>\</text:p>
            <text:p text:style-name="P1"><text:soft-page-break/><text:span text:style-name="T9"><text:s text:c="4"/>30 <text:s text:c="3"/>80 <text:s text:c="12"/>30 <text:s text:c="3"/>80</text:span></text:p>
            <text:p text:style-name="P10"><text:s text:c="4"/>/ \ <text:s text:c="2"/>/ <text:s text:c="13"/>/ \</text:p>
            <text:p text:style-name="P10"><text:s text:c="3"/>20 40 60 <text:s text:c="12"/>20 <text:s/>40</text:p>
          </table:table-cell>
        </table:table-row>
      </table:table>
      <text:p text:style-name="P1"/>
      <text:h text:style-name="P39" text:outline-level="2">3.4　BST 退化問題</text:h>
      <text:p text:style-name="P40"><text:span text:style-name="T16">BST 搜尋快的前提是「每次比較都能砍掉一半」</text:span>，<text:span text:style-name="T8">但這個前提要求樹夠平均</text:span>。若<text:span text:style-name="T6">插入順序不佳，樹會退化成直線</text:span>。</text:p>
      <text:p text:style-name="P41"/>
      <text:p text:style-name="P42">退化的三種情況</text:p>
      <text:p text:style-name="P43">① 遞增插入 → 右偏斜樹</text:p>
      <text:p text:style-name="P40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4">1</text:p>
            <text:p text:style-name="P44"><text:s/>\</text:p>
            <text:p text:style-name="P44"><text:s text:c="2"/>2</text:p>
            <text:p text:style-name="P44"><text:s text:c="3"/>\</text:p>
            <text:p text:style-name="P44"><text:s text:c="4"/>3 <text:s/>← 搜尋<text:span text:style-name="T11">效率退化為 O(n)</text:span>，不再是 O(log n)</text:p>
            <text:p text:style-name="P44"><text:s text:c="5"/>\</text:p>
            <text:p text:style-name="P44"><text:s text:c="6"/>4</text:p>
            <text:p text:style-name="P44"><text:s text:c="7"/>\</text:p>
            <text:p text:style-name="P44"><text:s text:c="8"/>5</text:p>
          </table:table-cell>
        </table:table-row>
      </table:table>
      <text:p text:style-name="P41"/>
      <text:p text:style-name="P43">② 遞減插入 → 左偏斜樹</text:p>
      <text:p text:style-name="P40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4"><text:s text:c="8"/>5</text:p>
            <text:p text:style-name="P44"><text:s text:c="7"/>/</text:p>
            <text:p text:style-name="P44"><text:s text:c="6"/>4</text:p>
            <text:p text:style-name="P44"><text:s text:c="5"/>/</text:p>
            <text:p text:style-name="P44"><text:s text:c="4"/>3</text:p>
            <text:p text:style-name="P44"><text:s text:c="3"/>/</text:p>
            <text:p text:style-name="P44"><text:s text:c="2"/>2</text:p>
            <text:p text:style-name="P44"><text:s/>/</text:p>
            <text:p text:style-name="P44">1</text:p>
          </table:table-cell>
        </table:table-row>
      </table:table>
      <text:p text:style-name="P41"/>
      <text:p text:style-name="P43">③ 鋸齒插入 → 看起來平衡，其實歪了</text:p>
      <text:p text:style-name="P40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4"><text:s text:c="8"/>10</text:p>
            <text:p text:style-name="P44"><text:s text:c="7"/>/</text:p>
            <text:p text:style-name="P44"><text:s text:c="6"/>1</text:p>
            <text:p text:style-name="P44"><text:s text:c="7"/>\</text:p>
            <text:p text:style-name="P44"><text:s text:c="8"/>9</text:p>
            <text:p text:style-name="P44"><text:s text:c="7"/>/</text:p>
            <text:p text:style-name="P45"><text:soft-page-break/><text:span text:style-name="T9"><text:s text:c="6"/>2</text:span></text:p>
            <text:p text:style-name="P44"><text:s text:c="7"/>\</text:p>
            <text:p text:style-name="P44"><text:s text:c="8"/>8</text:p>
            <text:p text:style-name="P44"><text:s text:c="7"/>/</text:p>
            <text:p text:style-name="P44"><text:s text:c="6"/>3 <text:s text:c="7"/>← 長歪但不明顯，一樣退化</text:p>
          </table:table-cell>
        </table:table-row>
      </table:table>
      <text:p text:style-name="P41"/>
      <text:p text:style-name="P42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46">操作</text:p>
          </table:table-cell>
          <table:table-cell table:style-name="表格69.A1" office:value-type="string">
            <text:p text:style-name="P46"><text:span text:style-name="T11">正常</text:span> BST（平衡）</text:p>
          </table:table-cell>
          <table:table-cell table:style-name="表格69.A1" office:value-type="string">
            <text:p text:style-name="P46"><text:span text:style-name="T14">退化</text:span> BST</text:p>
          </table:table-cell>
        </table:table-row>
        <table:table-row table:style-name="表格69.1">
          <table:table-cell table:style-name="表格69.A2" office:value-type="string">
            <text:p text:style-name="P40">搜尋</text:p>
          </table:table-cell>
          <table:table-cell table:style-name="表格69.B2" office:value-type="string">
            <text:p text:style-name="P47">O(<text:span text:style-name="T11">log n</text:span>)</text:p>
          </table:table-cell>
          <table:table-cell table:style-name="表格69.C2" office:value-type="string">
            <text:p text:style-name="P48">O(n)</text:p>
          </table:table-cell>
        </table:table-row>
        <table:table-row table:style-name="表格69.1">
          <table:table-cell table:style-name="表格69.A3" office:value-type="string">
            <text:p text:style-name="P40">插入</text:p>
          </table:table-cell>
          <table:table-cell table:style-name="表格69.B2" office:value-type="string">
            <text:p text:style-name="P47">O(<text:span text:style-name="T11">log n</text:span>)</text:p>
          </table:table-cell>
          <table:table-cell table:style-name="表格69.C2" office:value-type="string">
            <text:p text:style-name="P48">O(n)</text:p>
          </table:table-cell>
        </table:table-row>
        <table:table-row table:style-name="表格69.1">
          <table:table-cell table:style-name="表格69.A4" office:value-type="string">
            <text:p text:style-name="P40">刪除</text:p>
          </table:table-cell>
          <table:table-cell table:style-name="表格69.B2" office:value-type="string">
            <text:p text:style-name="P47">O(<text:span text:style-name="T11">log n</text:span>)</text:p>
          </table:table-cell>
          <table:table-cell table:style-name="表格69.C2" office:value-type="string">
            <text:p text:style-name="P48">O(n)</text:p>
          </table:table-cell>
        </table:table-row>
      </table:table>
      <text:p text:style-name="P41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9">📊 實際感受：10 萬筆資料</text:p>
            <text:p text:style-name="P49"><text:s/><text:span text:style-name="T8"><text:s/>正常 BST（平衡）：約 log₂(100000) ≈ 17 步找到</text:span></text:p>
            <text:p text:style-name="P49"><text:s text:c="2"/>退化 BST：最多 100,000 步 ← 慢了將近 6000 倍！</text:p>
          </table:table-cell>
        </table:table-row>
      </table:table>
      <text:p text:style-name="P41"/>
      <text:h text:style-name="P39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50"><text:span text:style-name="T20">偏斜樹</text:span> = <text:span text:style-name="T16">所有節點只有左子節點，或只有右子節點</text:span></text:p>
            <text:p text:style-name="P50">→ <text:span text:style-name="T6">形狀等同 Linked List</text:span></text:p>
            <text:p text:style-name="P50">→ 高度 h 時只有 h 個節點（最少）</text:p>
          </table:table-cell>
        </table:table-row>
      </table:table>
      <text:p text:style-name="P41"/>
      <text:p text:style-name="P40">如果<text:span text:style-name="T29">用陣列儲存</text:span><text:span text:style-name="T30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4">節點1 在 index=1</text:p>
            <text:p text:style-name="P44">節點2 在 index=3 <text:s/>（1 的右子 = <text:span text:style-name="T19">2×1+1</text:span> = 3）</text:p>
            <text:p text:style-name="P44">節點3 在 index=7 <text:s/>（3 的右子 = <text:span text:style-name="T19">2×3+1</text:span> = 7）</text:p>
            <text:p text:style-name="P44">節點4 在 index=15 （7 的右子 = <text:span text:style-name="T19">2×7+1</text:span> = 15）</text:p>
            <text:p text:style-name="P44">節點5 在 index=31 （15的右子 = <text:span text:style-name="T19">2×15+1</text:span> = 31）</text:p>
            <text:p text:style-name="P45"/>
            <text:p text:style-name="P44">陣列：</text:p>
            <text:p text:style-name="P44">index: <text:s/>1 <text:s/>2 <text:s/>3 <text:s/>4 <text:s/>5 <text:s/>6 <text:s/>7 <text:s/>8 ... 14 <text:s/>15 <text:s/>16 ... 30 <text:s/>31</text:p>
            <text:p text:style-name="P44">value: <text:s/>1 <text:s/>- <text:s/>2 <text:s/>- <text:s/>- <text:s/>- <text:s/>3 <text:s/>- <text:s/>... <text:s/>- 4 <text:s text:c="2"/>- <text:s/>... <text:s/>- <text:s text:c="2"/>5</text:p>
            <text:p text:style-name="P44"><text:s text:c="14"/>↑ <text:s text:c="10"/>↑ <text:s text:c="11"/>↑ <text:s text:c="14"/>↑</text:p>
            <text:p text:style-name="P44"><text:s text:c="13"/>節點2 <text:s text:c="6"/>節點3 <text:s text:c="7"/>節點4 <text:s text:c="11"/>節點5</text:p>
            <text:p text:style-name="P45"/>
            <text:p text:style-name="P44"><text:span text:style-name="T31">5 個節點，卻佔用 2^5 - 1 = 31 格</text:span>，<text:span text:style-name="T17">浪費 26 格！</text:span></text:p>
          </table:table-cell>
        </table:table-row>
      </table:table>
      <text:p text:style-name="P41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46">節點數 n</text:p>
          </table:table-cell>
          <table:table-cell table:style-name="表格73.A1" office:value-type="string">
            <text:p text:style-name="P46">需要陣列格數</text:p>
          </table:table-cell>
          <table:table-cell table:style-name="表格73.A1" office:value-type="string">
            <text:p text:style-name="P46">浪費格數</text:p>
          </table:table-cell>
          <table:table-cell table:style-name="表格73.A1" office:value-type="string">
            <text:p text:style-name="P46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40">3</text:p>
          </table:table-cell>
          <table:table-cell table:style-name="表格73.B2" office:value-type="string">
            <text:p text:style-name="P40">7</text:p>
          </table:table-cell>
          <table:table-cell table:style-name="表格73.C2" office:value-type="string">
            <text:p text:style-name="P51">4</text:p>
          </table:table-cell>
          <table:table-cell table:style-name="表格73.C2" office:value-type="string">
            <text:p text:style-name="P52">43%</text:p>
          </table:table-cell>
        </table:table-row>
        <table:table-row table:style-name="表格73.1">
          <table:table-cell table:style-name="表格73.A3" office:value-type="string">
            <text:p text:style-name="P40">5</text:p>
          </table:table-cell>
          <table:table-cell table:style-name="表格73.B3" office:value-type="string">
            <text:p text:style-name="P40">31</text:p>
          </table:table-cell>
          <table:table-cell table:style-name="表格73.C2" office:value-type="string">
            <text:p text:style-name="P51">26</text:p>
          </table:table-cell>
          <table:table-cell table:style-name="表格73.C2" office:value-type="string">
            <text:p text:style-name="P52">16%</text:p>
          </table:table-cell>
        </table:table-row>
        <table:table-row table:style-name="表格73.1">
          <table:table-cell table:style-name="表格73.A4" office:value-type="string">
            <text:p text:style-name="P40">10</text:p>
          </table:table-cell>
          <table:table-cell table:style-name="表格73.B4" office:value-type="string">
            <text:p text:style-name="P40">1,023</text:p>
          </table:table-cell>
          <table:table-cell table:style-name="表格73.C2" office:value-type="string">
            <text:p text:style-name="P51">1,013</text:p>
          </table:table-cell>
          <table:table-cell table:style-name="表格73.C2" office:value-type="string">
            <text:p text:style-name="P52">&lt; 1%</text:p>
          </table:table-cell>
        </table:table-row>
      </table:table>
      <text:p text:style-name="P41"/>
      <text:h text:style-name="P39" text:outline-level="2">3.6　<text:span text:style-name="T14">解決方法：平衡樹</text:span></text:h>
      <text:p text:style-name="P40"><text:span text:style-name="T8">只要讓樹「自動保持平衡」</text:span>，<text:span text:style-name="T16">就能確保搜尋永遠是 O(log n)</text:span>。</text:p>
      <text:p text:style-name="P41"/>
      <text:p text:style-name="P42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3">強制規定：任何節點的左右子樹高度差 ≤ 1</text:p>
            <text:p text:style-name="P53">違反時立即「旋轉」調整</text:p>
          </table:table-cell>
        </table:table-row>
      </table:table>
      <text:p text:style-name="P40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4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44"><text:s text:c="2"/>1 <text:s text:c="3"/>← 左子樹高度=0</text:p>
                  <text:p text:style-name="P44"><text:s/>\ <text:s text:c="4"/>← 右子樹高度=2，差值=2！</text:p>
                  <text:p text:style-name="P44"><text:s text:c="2"/>2</text:p>
                  <text:p text:style-name="P44"><text:s/>\</text:p>
                  <text:p text:style-name="P44"><text:s text:c="2"/>3</text:p>
                </table:table-cell>
              </table:table-row>
            </table:table>
            <text:p text:style-name="P55"/>
          </table:table-cell>
          <table:table-cell table:style-name="表格75.B1" office:value-type="string">
            <text:p text:style-name="P56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44"><text:s text:c="4"/>2 <text:s text:c="2"/>← 左右子樹高度各=1</text:p>
                  <text:p text:style-name="P44"><text:s text:c="3"/>/ \</text:p>
                  <text:p text:style-name="P44"><text:s text:c="2"/>1 <text:s text:c="2"/>3</text:p>
                </table:table-cell>
              </table:table-row>
            </table:table>
            <text:p text:style-name="P55"/>
          </table:table-cell>
        </table:table-row>
      </table:table>
      <text:p text:style-name="P41"/>
      <text:p text:style-name="P40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46">旋轉類型</text:p>
          </table:table-cell>
          <table:table-cell table:style-name="表格78.A1" office:value-type="string">
            <text:p text:style-name="P46">發生條件</text:p>
          </table:table-cell>
          <table:table-cell table:style-name="表格78.A1" office:value-type="string">
            <text:p text:style-name="P46">操作</text:p>
          </table:table-cell>
        </table:table-row>
        <table:table-row table:style-name="表格78.1">
          <table:table-cell table:style-name="表格78.A2" office:value-type="string">
            <text:p text:style-name="P57">LL 旋轉</text:p>
          </table:table-cell>
          <table:table-cell table:style-name="表格78.B2" office:value-type="string">
            <text:p text:style-name="P40">新節點在左子樹的左邊</text:p>
          </table:table-cell>
          <table:table-cell table:style-name="表格78.C2" office:value-type="string">
            <text:p text:style-name="P40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57">RR 旋轉</text:p>
          </table:table-cell>
          <table:table-cell table:style-name="表格78.B3" office:value-type="string">
            <text:p text:style-name="P40">新節點在右子樹的右邊</text:p>
          </table:table-cell>
          <table:table-cell table:style-name="表格78.C3" office:value-type="string">
            <text:p text:style-name="P40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57">LR 旋轉</text:p>
          </table:table-cell>
          <table:table-cell table:style-name="表格78.B4" office:value-type="string">
            <text:p text:style-name="P40">新節點在左子樹的右邊</text:p>
          </table:table-cell>
          <table:table-cell table:style-name="表格78.C4" office:value-type="string">
            <text:p text:style-name="P40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57">RL 旋轉</text:p>
          </table:table-cell>
          <table:table-cell table:style-name="表格78.B5" office:value-type="string">
            <text:p text:style-name="P40">新節點在右子樹的左邊</text:p>
          </table:table-cell>
          <table:table-cell table:style-name="表格78.C5" office:value-type="string">
            <text:p text:style-name="P40">先右旋再左旋（兩次）</text:p>
          </table:table-cell>
        </table:table-row>
      </table:table>
      <text:p text:style-name="P41"/>
      <text:p text:style-name="P42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8">規則比 AVL Tree 寬鬆，不要求嚴格平衡，旋轉次數更少</text:p>
            <text:p text:style-name="P58">平均效能比 AVL Tree 更穩定，適合頻繁插入刪除的場景</text:p>
            <text:p text:style-name="P59"/>
            <text:p text:style-name="P58">實際應用：</text:p>
            <text:p text:style-name="P58"><text:s text:c="2"/>✔ C++ STL 的 std::map、std::set</text:p>
            <text:p text:style-name="P58"><text:s text:c="2"/>✔ Java 的 TreeMap、TreeSet</text:p>
            <text:p text:style-name="P58"><text:s text:c="2"/>✔ Linux 核心的行程排程器</text:p>
          </table:table-cell>
        </table:table-row>
      </table:table>
      <text:p text:style-name="P41"><text:soft-page-break/></text:p>
      <text:p text:style-name="P42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53">每個節點可以有很多 key（不只 2 個）</text:p>
            <text:p text:style-name="P53">專為磁碟讀取最佳化：一次讀一個節點 = 一次磁碟 I/O</text:p>
            <text:p text:style-name="P59"/>
            <text:p text:style-name="P53">實際應用：</text:p>
            <text:p text:style-name="P53"><text:s text:c="2"/>✔ MySQL、PostgreSQL 的索引（Index）</text:p>
            <text:p text:style-name="P53"><text:s text:c="2"/>✔ 檔案系統（NTFS、ext4）</text:p>
          </table:table-cell>
        </table:table-row>
      </table:table>
      <text:p text:style-name="P41"/>
      <text:p text:style-name="P42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60"/>
          </table:table-cell>
          <table:table-cell table:style-name="表格81.A1" office:value-type="string">
            <text:p text:style-name="P46">AVL Tree</text:p>
          </table:table-cell>
          <table:table-cell table:style-name="表格81.A1" office:value-type="string">
            <text:p text:style-name="P46">Red-Black Tree</text:p>
          </table:table-cell>
          <table:table-cell table:style-name="表格81.A1" office:value-type="string">
            <text:p text:style-name="P46">B-Tree</text:p>
          </table:table-cell>
        </table:table-row>
        <table:table-row table:style-name="表格81.1">
          <table:table-cell table:style-name="表格81.A2" office:value-type="string">
            <text:p text:style-name="P46">嚴格程度</text:p>
          </table:table-cell>
          <table:table-cell table:style-name="表格81.B2" office:value-type="string">
            <text:p text:style-name="P40">最嚴格</text:p>
          </table:table-cell>
          <table:table-cell table:style-name="表格81.C2" office:value-type="string">
            <text:p text:style-name="P40">較寬鬆</text:p>
          </table:table-cell>
          <table:table-cell table:style-name="表格81.D2" office:value-type="string">
            <text:p text:style-name="P40">依階數</text:p>
          </table:table-cell>
        </table:table-row>
        <table:table-row table:style-name="表格81.1">
          <table:table-cell table:style-name="表格81.A2" office:value-type="string">
            <text:p text:style-name="P46">搜尋速度</text:p>
          </table:table-cell>
          <table:table-cell table:style-name="表格81.B3" office:value-type="string">
            <text:p text:style-name="P40">最快</text:p>
          </table:table-cell>
          <table:table-cell table:style-name="表格81.C3" office:value-type="string">
            <text:p text:style-name="P40">略慢</text:p>
          </table:table-cell>
          <table:table-cell table:style-name="表格81.D3" office:value-type="string">
            <text:p text:style-name="P40">磁碟最優</text:p>
          </table:table-cell>
        </table:table-row>
        <table:table-row table:style-name="表格81.1">
          <table:table-cell table:style-name="表格81.A2" office:value-type="string">
            <text:p text:style-name="P46">插入刪除</text:p>
          </table:table-cell>
          <table:table-cell table:style-name="表格81.B4" office:value-type="string">
            <text:p text:style-name="P40">較慢（旋轉多）</text:p>
          </table:table-cell>
          <table:table-cell table:style-name="表格81.C4" office:value-type="string">
            <text:p text:style-name="P40">較快</text:p>
          </table:table-cell>
          <table:table-cell table:style-name="表格81.D4" office:value-type="string">
            <text:p text:style-name="P40">磁碟最優</text:p>
          </table:table-cell>
        </table:table-row>
        <table:table-row table:style-name="表格81.1">
          <table:table-cell table:style-name="表格81.A2" office:value-type="string">
            <text:p text:style-name="P46">主要用途</text:p>
          </table:table-cell>
          <table:table-cell table:style-name="表格81.B5" office:value-type="string">
            <text:p text:style-name="P40">記憶體搜尋</text:p>
          </table:table-cell>
          <table:table-cell table:style-name="表格81.C5" office:value-type="string">
            <text:p text:style-name="P40">STL / Java</text:p>
          </table:table-cell>
          <table:table-cell table:style-name="表格81.D5" office:value-type="string">
            <text:p text:style-name="P40">資料庫索引</text:p>
          </table:table-cell>
        </table:table-row>
      </table:table>
      <text:p text:style-name="P41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1">🎯 一句話記住核心：</text:p>
            <text:p text:style-name="P61">BST 不保證平衡，插入順序決定形狀；</text:p>
            <text:p text:style-name="P61">要保證 O(log n) 就必須用 AVL Tree 或 Red-Black Tree。</text:p>
          </table:table-cell>
        </table:table-row>
      </table:table>
      <text:p text:style-name="P62"/>
      <text:p text:style-name="P62"/>
      <text:h text:style-name="P63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4">先搞清楚：AVL Tree 和 Red-Black Tree 是二元樹（每節點最多 2 個小孩）</text:p>
            <text:p text:style-name="P64">但 B-Tree 不是二元樹！每個節點可以有很多小孩，是「多元樹（M-ary Tree）」</text:p>
          </table:table-cell>
        </table:table-row>
      </table:table>
      <text:p text:style-name="P65"/>
      <text:p text:style-name="P66"/>
      <text:h text:style-name="P67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68"><text:span text:style-name="T20">AVL Tree</text:span> = <text:span text:style-name="T3">自動保持平衡</text:span>的 <text:span text:style-name="T6">BST（Binary Search Tree）</text:span></text:p>
            <text:p text:style-name="P68">✔<text:span text:style-name="T32"> 是二元樹</text:span>（每節點最多 2 個 child）</text:p>
            <text:p text:style-name="P68">✔ 同時也是 <text:span text:style-name="T8">BST（左 &lt; 根 &lt; 右）</text:span></text:p>
            <text:p text:style-name="P68">✔ 額外保證：<text:span text:style-name="T33">任何節點的「平衡因子」絕對值 </text:span><text:span text:style-name="T34">≤ 1</text:span></text:p>
          </table:table-cell>
        </table:table-row>
      </table:table>
      <text:p text:style-name="P65"/>
      <text:h text:style-name="P63" text:outline-level="2">AVL-1　平衡因子（Balance Factor）</text:h>
      <text:p text:style-name="P69"><text:span text:style-name="T14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70">平衡因子（BF）= 左子樹高度 − 右子樹高度</text:p>
            <text:p text:style-name="P71"/>
            <text:p text:style-name="P72">BF = <text:s/>0 <text:s/>→ 左右一樣高，完全平衡</text:p>
            <text:p text:style-name="P72">BF = <text:s/>1 <text:s/>→ 左邊比右邊高 1，仍然合法</text:p>
            <text:p text:style-name="P72">BF = -1 <text:s/>→ 右邊比左邊高 1，仍然合法</text:p>
            <text:p text:style-name="P73">BF ≥ 2 或 ≤ -2 <text:s/>→ 失衡！必須旋轉修復</text:p>
          </table:table-cell>
        </table:table-row>
      </table:table>
      <text:p text:style-name="P65"/>
      <text:p text:style-name="P69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74"><text:s text:c="8"/>30 (BF=1) <text:s text:c="9"/>← 左高度2，右高度1，差=1 合法</text:p>
            <text:p text:style-name="P74"><text:s text:c="7"/>/ <text:s/>\</text:p>
            <text:p text:style-name="P74"><text:s text:c="4"/>20(1) <text:s/>40(0) <text:s text:c="10"/>← BF 都在 -1~1 之間</text:p>
            <text:p text:style-name="P74"><text:s text:c="3"/>/</text:p>
            <text:p text:style-name="P74"><text:s text:c="2"/>10(0)</text:p>
          </table:table-cell>
        </table:table-row>
      </table:table>
      <text:p text:style-name="P65"/>
      <text:h text:style-name="P63" text:outline-level="2">AVL-2　四種旋轉（超重要，考試必考）</text:h>
      <text:p text:style-name="P69"><text:span text:style-name="T35">只要插入或刪除後有節點的 BF 超出範圍</text:span>，<text:span text:style-name="T20">就立刻旋轉修復</text:span>。共有 4 種情況：</text:p>
      <text:p text:style-name="P65"/>
      <text:p text:style-name="P75">旋轉一：LL 旋轉（新節點插入在<text:span text:style-name="T14">失衡節點左子樹</text:span>的左邊）</text:p>
      <text:p text:style-name="P69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76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74"><text:s text:c="4"/>30 (BF=2) ← 失衡！</text:p>
                  <text:p text:style-name="P74"><text:s text:c="3"/>/</text:p>
                  <text:p text:style-name="P74"><text:s/><text:span text:style-name="T36"><text:s/>20</text:span> (BF=1)</text:p>
                  <text:p text:style-name="P74"><text:s/>/</text:p>
                  <text:p text:style-name="P74">10 <text:s text:c="11"/>← 新插入節點</text:p>
                </table:table-cell>
              </table:table-row>
            </table:table>
            <text:p text:style-name="P66"/>
          </table:table-cell>
          <table:table-cell table:style-name="表格87.B1" office:value-type="string">
            <text:p text:style-name="P77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74"><text:s text:c="4"/>20 (BF=0)</text:p>
                  <text:p text:style-name="P74"><text:s text:c="3"/>/ <text:s/>\</text:p>
                  <text:p text:style-name="P74"><text:s text:c="2"/>10 <text:s text:c="2"/>30</text:p>
                  <text:p text:style-name="P78"/>
                  <text:p text:style-name="P74">20 變成新的根，</text:p>
                  <text:p text:style-name="P74">30 變成 20 的右子</text:p>
                </table:table-cell>
              </table:table-row>
            </table:table>
            <text:p text:style-name="P66"/>
          </table:table-cell>
        </table:table-row>
      </table:table>
      <text:p text:style-name="P65"/>
      <text:p text:style-name="P75">旋轉二：RR 旋轉（新節點插入在<text:span text:style-name="T14">失衡節點右子樹</text:span>的右邊）</text:p>
      <text:p text:style-name="P69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76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74"><text:s text:c="2"/>10 (BF=-2) ← 失衡！</text:p>
                  <text:p text:style-name="P74"><text:s text:c="4"/>\</text:p>
                  <text:p text:style-name="P74"><text:s text:c="4"/><text:span text:style-name="T36">20</text:span> (BF=-1)</text:p>
                  <text:p text:style-name="P74"><text:s text:c="6"/>\</text:p>
                  <text:p text:style-name="P74"><text:s text:c="6"/>30 <text:s text:c="4"/>← 新插入節點</text:p>
                </table:table-cell>
              </table:table-row>
            </table:table>
            <text:p text:style-name="P66"/>
          </table:table-cell>
          <table:table-cell table:style-name="表格90.B1" office:value-type="string">
            <text:p text:style-name="P77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74"><text:s text:c="4"/>20 (BF=0)</text:p>
                  <text:p text:style-name="P74"><text:s text:c="3"/>/ <text:s/>\</text:p>
                  <text:p text:style-name="P74"><text:s text:c="2"/>10 <text:s text:c="2"/>30</text:p>
                  <text:p text:style-name="P78"/>
                  <text:p text:style-name="P74">20 變成新的根，</text:p>
                  <text:p text:style-name="P74">10 變成 20 的左子</text:p>
                </table:table-cell>
              </table:table-row>
            </table:table>
            <text:p text:style-name="P66"/>
          </table:table-cell>
        </table:table-row>
      </table:table>
      <text:p text:style-name="P65"/>
      <text:p text:style-name="P75">旋轉三：<text:span text:style-name="T14">LR </text:span>旋轉（新節點插入在<text:span text:style-name="T14">失衡節點左子樹</text:span>的右邊）</text:p>
      <text:p text:style-name="P69">解法：<text:span text:style-name="T8">先對左子節點做左旋</text:span>，<text:span text:style-name="T16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74">插入前（失衡）： <text:s text:c="9"/>第一步：<text:span text:style-name="T37">左旋</text:span> 20： <text:s text:c="5"/>第二步：<text:span text:style-name="T37">右旋</text:span> 30：</text:p>
            <text:p text:style-name="P74"><text:s text:c="4"/>30 (BF=2) <text:s text:c="16"/>30 (BF=2) <text:s text:c="13"/><text:span text:style-name="T20">25</text:span> (BF=0)</text:p>
            <text:p text:style-name="P74"><text:s text:c="3"/>/ <text:s text:c="24"/>/ <text:s text:c="21"/>/ <text:s/>\</text:p>
            <text:p text:style-name="P74"><text:s text:c="2"/><text:span text:style-name="T36">20</text:span> (BF=-1) <text:s text:c="14"/><text:span text:style-name="T20">25</text:span> (BF=1) <text:s text:c="11"/>20 <text:s text:c="4"/><text:span text:style-name="T20">30</text:span></text:p>
            <text:p text:style-name="P74"><text:s text:c="4"/>\ <text:s text:c="21"/>/</text:p>
            <text:p text:style-name="P74"><text:s text:c="4"/>25 <text:s/>← 新節點 <text:s text:c="8"/><text:span text:style-name="T20">20</text:span></text:p>
          </table:table-cell>
        </table:table-row>
      </table:table>
      <text:p text:style-name="P65"/>
      <text:p text:style-name="P75">旋轉四：<text:span text:style-name="T14">RL</text:span> 旋轉（新節點插入在<text:span text:style-name="T14">失衡節點右子樹</text:span>的左邊）</text:p>
      <text:p text:style-name="P69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74">插入前（失衡）： <text:s text:c="9"/>第一步：右旋 40： <text:s text:c="5"/>第二步：左旋 20：</text:p>
            <text:p text:style-name="P74"><text:s text:c="2"/>20 (BF=-2) <text:s text:c="15"/>20 (BF=-2) <text:s text:c="13"/>25 (BF=0)</text:p>
            <text:p text:style-name="P74"><text:s text:c="4"/>\ <text:s text:c="24"/>\ <text:s text:c="19"/>/ <text:s/>\</text:p>
            <text:p text:style-name="P74"><text:s text:c="4"/>40 (BF=1) <text:s text:c="16"/>25 (BF=-1) <text:s text:c="8"/>20 <text:s text:c="4"/>40</text:p>
            <text:p text:style-name="P74"><text:s text:c="3"/>/ <text:s text:c="27"/>\</text:p>
            <text:p text:style-name="P74"><text:s text:c="2"/>25 <text:s/>← 新節點 <text:s text:c="18"/>40</text:p>
          </table:table-cell>
        </table:table-row>
      </table:table>
      <text:p text:style-name="P65"/>
      <text:h text:style-name="P63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79">旋轉類型</text:p>
          </table:table-cell>
          <table:table-cell table:style-name="表格95.A1" office:value-type="string">
            <text:p text:style-name="P79">BF失衡情況</text:p>
          </table:table-cell>
          <table:table-cell table:style-name="表格95.A1" office:value-type="string">
            <text:p text:style-name="P79">新節點位置</text:p>
          </table:table-cell>
          <table:table-cell table:style-name="表格95.A1" office:value-type="string">
            <text:p text:style-name="P79">旋轉方式</text:p>
          </table:table-cell>
        </table:table-row>
        <table:table-row table:style-name="表格95.1">
          <table:table-cell table:style-name="表格95.A2" office:value-type="string">
            <text:p text:style-name="P80">LL 旋轉</text:p>
          </table:table-cell>
          <table:table-cell table:style-name="表格95.B2" office:value-type="string">
            <text:p text:style-name="P69"><text:span text:style-name="T11">BF ≥ 2</text:span>（<text:span text:style-name="T14">左重</text:span>）</text:p>
          </table:table-cell>
          <table:table-cell table:style-name="表格95.C2" office:value-type="string">
            <text:p text:style-name="P81">左子樹的左邊</text:p>
          </table:table-cell>
          <table:table-cell table:style-name="表格95.D2" office:value-type="string">
            <text:p text:style-name="P69">右旋一次</text:p>
          </table:table-cell>
        </table:table-row>
        <table:table-row table:style-name="表格95.1">
          <table:table-cell table:style-name="表格95.A3" office:value-type="string">
            <text:p text:style-name="P80">RR 旋轉</text:p>
          </table:table-cell>
          <table:table-cell table:style-name="表格95.B3" office:value-type="string">
            <text:p text:style-name="P69"><text:span text:style-name="T11">BF ≤ -2</text:span>（<text:span text:style-name="T38">右重</text:span>）</text:p>
          </table:table-cell>
          <table:table-cell table:style-name="表格95.C3" office:value-type="string">
            <text:p text:style-name="P81">右子樹的右邊</text:p>
          </table:table-cell>
          <table:table-cell table:style-name="表格95.D3" office:value-type="string">
            <text:p text:style-name="P69">左旋一次</text:p>
          </table:table-cell>
        </table:table-row>
        <table:table-row table:style-name="表格95.1">
          <table:table-cell table:style-name="表格95.A4" office:value-type="string">
            <text:p text:style-name="P80">LR 旋轉</text:p>
          </table:table-cell>
          <table:table-cell table:style-name="表格95.B4" office:value-type="string">
            <text:p text:style-name="P69"><text:span text:style-name="T39">BF ≥ 2</text:span>（<text:span text:style-name="T40">左重</text:span>）</text:p>
          </table:table-cell>
          <table:table-cell table:style-name="表格95.C4" office:value-type="string">
            <text:p text:style-name="P82">左子樹的右邊</text:p>
          </table:table-cell>
          <table:table-cell table:style-name="表格95.D4" office:value-type="string">
            <text:p text:style-name="P69">先左旋再右旋</text:p>
          </table:table-cell>
        </table:table-row>
        <table:table-row table:style-name="表格95.1">
          <table:table-cell table:style-name="表格95.A5" office:value-type="string">
            <text:p text:style-name="P80">RL 旋轉</text:p>
          </table:table-cell>
          <table:table-cell table:style-name="表格95.B5" office:value-type="string">
            <text:p text:style-name="P69"><text:span text:style-name="T39">BF ≤ -2</text:span>（<text:span text:style-name="T40">右重</text:span>）</text:p>
          </table:table-cell>
          <table:table-cell table:style-name="表格95.C5" office:value-type="string">
            <text:p text:style-name="P82">右子樹的左邊</text:p>
          </table:table-cell>
          <table:table-cell table:style-name="表格95.D5" office:value-type="string">
            <text:p text:style-name="P69">先右旋再左旋</text:p>
          </table:table-cell>
        </table:table-row>
      </table:table>
      <text:p text:style-name="P65"/>
      <text:h text:style-name="P63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83">AVL Tree <text:span text:style-name="T8">高度永遠維持在 O(log n)</text:span></text:p>
            <text:p text:style-name="P71"><text:soft-page-break/><text:span text:style-name="T41">搜尋：O(log n) <text:s text:c="2"/>插入：O(log n) <text:s text:c="2"/>刪除：O(log n)</text:span></text:p>
            <text:p text:style-name="P71"/>
            <text:p text:style-name="P83">代價：<text:span text:style-name="T17">每次插入/刪除後都要「往上回頭檢查每個節點的 BF」</text:span>，可能旋轉多次</text:p>
            <text:p text:style-name="P83">→ 如果需要大量插入刪除，Red-Black Tree 可能更適合</text:p>
          </table:table-cell>
        </table:table-row>
      </table:table>
      <text:p text:style-name="P66"/>
      <text:h text:style-name="P67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84">Red-Black Tree（紅黑樹）= <text:span text:style-name="T11">每個節點標記「紅色或黑色」</text:span>的<text:span text:style-name="T6">自平衡 BST</text:span></text:p>
            <text:p text:style-name="P84">✔ <text:span text:style-name="T32">是二元樹</text:span>（每節點最多 2 個 child）</text:p>
            <text:p text:style-name="P84">✔ 同時也是 <text:span text:style-name="T8">BST（左 &lt; 根 &lt; 右）</text:span></text:p>
            <text:p text:style-name="P84">✔ <text:span text:style-name="T21">用</text:span><text:span text:style-name="T42">顏色</text:span><text:span text:style-name="T21">規則</text:span><text:span text:style-name="T42">取代</text:span><text:span text:style-name="T21">嚴格的高度差限制</text:span>，效能更穩定</text:p>
          </table:table-cell>
        </table:table-row>
      </table:table>
      <text:p text:style-name="P65"/>
      <text:h text:style-name="P63" text:outline-level="2">RBT-1　五條規則（缺一不可）</text:h>
      <text:p text:style-name="P69">每棵 Red-Black Tree 必須同時滿足以下五條：</text:p>
      <text:p text:style-name="P65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85">規則1</text:p>
          </table:table-cell>
          <table:table-cell table:style-name="表格98.B1" office:value-type="string">
            <text:p text:style-name="P69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85">規則2</text:p>
          </table:table-cell>
          <table:table-cell table:style-name="表格98.B2" office:value-type="string">
            <text:p text:style-name="P86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85">規則3</text:p>
          </table:table-cell>
          <table:table-cell table:style-name="表格98.B3" office:value-type="string">
            <text:p text:style-name="P87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85">規則4</text:p>
          </table:table-cell>
          <table:table-cell table:style-name="表格98.B4" office:value-type="string">
            <text:p text:style-name="P69">紅色節點的小孩一定是黑色（<text:span text:style-name="T6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85">規則5</text:p>
          </table:table-cell>
          <table:table-cell table:style-name="表格98.B5" office:value-type="string">
            <text:p text:style-name="P69">從<text:span text:style-name="T20">任意節點到</text:span><text:span text:style-name="T43">其</text:span><text:span text:style-name="T44">所有</text:span><text:span text:style-name="T43">葉節點</text:span><text:span text:style-name="T20">的路徑</text:span>，<text:span text:style-name="T32">黑色節點數量相同</text:span>（<text:span text:style-name="T33">黑高度相同</text:span>）</text:p>
          </table:table-cell>
        </table:table-row>
      </table:table>
      <text:p text:style-name="P65"/>
      <text:h text:style-name="P88" text:outline-level="2">RBT-2　視覺化說明（含 NIL 節點完整版）</text:h>
      <text:p text:style-name="P89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90">⚠️ 超重要陷阱：<text:span text:style-name="T44">Red-Black Tree 的「葉節點」和 Binary Tree 的「葉節點」</text:span><text:span text:style-name="T45">不同！</text:span></text:p>
            <text:p text:style-name="P91"/>
            <text:p text:style-name="P92">Binary Tree 的葉節點 = 沒有小孩的實際資料節點（如 3、7、30）</text:p>
            <text:p text:style-name="P93">Red-Black Tree 的葉節點 = NIL（NULL）節點</text:p>
            <text:p text:style-name="P90"><text:s text:c="26"/>↑ 也就是<text:span text:style-name="T46">每個實際節點下面「空的位置」</text:span></text:p>
            <text:p text:style-name="P91"/>
            <text:p text:style-name="P90">規則3<text:span text:style-name="T16">「所有葉節點都是黑色」真正的意思是</text:span>：<text:span text:style-name="T32">所有 NIL 都是黑色</text:span></text:p>
            <text:p text:style-name="P90">不是說「所有沒有小孩的實際資料節點都必須是黑色」！</text:p>
          </table:table-cell>
        </table:table-row>
      </table:table>
      <text:p text:style-name="P89"/>
      <text:p text:style-name="P94">省略版（教科書常見畫法，<text:span text:style-name="T23">NIL 不畫出來</text:span>）</text:p>
      <text:p text:style-name="P95">一般教材<text:span text:style-name="T11">為了簡潔</text:span>，<text:span text:style-name="T32">把 NIL 節點全部省略</text:span>，<text:span text:style-name="T11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96"><text:s text:c="13"/>B:10</text:p>
            <text:p text:style-name="P96"><text:s text:c="12"/>/ <text:s text:c="3"/>\</text:p>
            <text:p text:style-name="P96"><text:s text:c="10"/>R:5 <text:s text:c="3"/>B:20</text:p>
            <text:p text:style-name="P96"><text:s text:c="9"/>/ <text:s/>\ <text:s text:c="5"/>\</text:p>
            <text:p text:style-name="P96"><text:s text:c="7"/>B:3 <text:s/>B:7 <text:s text:c="3"/>R:30</text:p>
            <text:p text:style-name="P97"><text:soft-page-break/></text:p>
            <text:p text:style-name="P96">← <text:span text:style-name="T11">這棵樹看起來 30(R) 是葉子</text:span>，<text:span text:style-name="T47">卻是紅色</text:span>，<text:span text:style-name="T32">初學者會以為違規！</text:span></text:p>
            <text:p text:style-name="P96"><text:s text:c="3"/>但<text:span text:style-name="T8">其實 30 下面還有兩個 NIL(B)</text:span>，所以規則3仍然成立。</text:p>
          </table:table-cell>
        </table:table-row>
      </table:table>
      <text:p text:style-name="P89"/>
      <text:p text:style-name="P94">完整版（含所有 NIL 節點）</text:p>
      <text:p text:style-name="P95"><text:span text:style-name="T8">把所有 NIL 節點畫出來</text:span>，<text:span text:style-name="T12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96"><text:s text:c="20"/>B:10</text:p>
            <text:p text:style-name="P96"><text:s text:c="18"/>/ <text:s text:c="5"/>\</text:p>
            <text:p text:style-name="P96"><text:s text:c="15"/>R:5 <text:s text:c="6"/>B:20</text:p>
            <text:p text:style-name="P96"><text:s text:c="14"/>/ <text:s text:c="2"/>\ <text:s text:c="5"/>/ <text:s text:c="3"/>\</text:p>
            <text:p text:style-name="P96"><text:s text:c="11"/>B:3 <text:s text:c="2"/>B:7 <text:s/><text:span text:style-name="T11">NIL(B)</text:span> <text:s/>R:30</text:p>
            <text:p text:style-name="P96"><text:s text:c="11"/>/ \ <text:s text:c="2"/>/ \ <text:s text:c="9"/>/ <text:s text:c="3"/>\</text:p>
            <text:p text:style-name="P96"><text:s text:c="8"/><text:span text:style-name="T11">NIL</text:span> <text:span text:style-name="T11">NIL</text:span> <text:span text:style-name="T11">NIL</text:span> <text:span text:style-name="T11">NIL</text:span> <text:s text:c="4"/><text:span text:style-name="T11">NIL</text:span> <text:s text:c="2"/><text:span text:style-name="T11">NIL</text:span></text:p>
            <text:p text:style-name="P96"><text:s text:c="8"/><text:span text:style-name="T11">(B)</text:span> <text:span text:style-name="T11">(B)</text:span> <text:span text:style-name="T11">(B)</text:span> <text:span text:style-name="T11">(B)</text:span> <text:s text:c="4"/><text:span text:style-name="T11">(B)</text:span> <text:s text:c="2"/><text:span text:style-name="T11">(B)</text:span></text:p>
            <text:p text:style-name="P97"/>
            <text:p text:style-name="P96">← <text:span text:style-name="T48">所有 NIL 都是黑色</text:span>，規則3 ✔</text:p>
            <text:p text:style-name="P96">← 30(R) 的兩個小孩都是 NIL(B)，規則4 ✔</text:p>
            <text:p text:style-name="P96">← 20(B) 的左小孩是 NIL(B)，右小孩是 30(R)，這也完全合法</text:p>
          </table:table-cell>
        </table:table-row>
      </table:table>
      <text:p text:style-name="P89"/>
      <text:p text:style-name="P94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98">規則</text:p>
          </table:table-cell>
          <table:table-cell table:style-name="表格115.A1" office:value-type="string">
            <text:p text:style-name="P98">結果</text:p>
          </table:table-cell>
          <table:table-cell table:style-name="表格115.A1" office:value-type="string">
            <text:p text:style-name="P98">說明</text:p>
          </table:table-cell>
        </table:table-row>
        <table:table-row table:style-name="表格115.1">
          <table:table-cell table:style-name="表格115.A2" office:value-type="string">
            <text:p text:style-name="P99">規則1</text:p>
          </table:table-cell>
          <table:table-cell table:style-name="表格115.B2" office:value-type="string">
            <text:p text:style-name="P100">✅ 成立</text:p>
          </table:table-cell>
          <table:table-cell table:style-name="表格115.C2" office:value-type="string">
            <text:p text:style-name="P95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99">規則2</text:p>
          </table:table-cell>
          <table:table-cell table:style-name="表格115.B2" office:value-type="string">
            <text:p text:style-name="P100">✅ 成立</text:p>
          </table:table-cell>
          <table:table-cell table:style-name="表格115.C3" office:value-type="string">
            <text:p text:style-name="P101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99">規則3</text:p>
          </table:table-cell>
          <table:table-cell table:style-name="表格115.B2" office:value-type="string">
            <text:p text:style-name="P100">✅ 成立</text:p>
          </table:table-cell>
          <table:table-cell table:style-name="表格115.C4" office:value-type="string">
            <text:p text:style-name="P95"><text:span text:style-name="T11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99">規則4</text:p>
          </table:table-cell>
          <table:table-cell table:style-name="表格115.B2" office:value-type="string">
            <text:p text:style-name="P100">✅ 成立</text:p>
          </table:table-cell>
          <table:table-cell table:style-name="表格115.C5" office:value-type="string">
            <text:p text:style-name="P95">R:5 的小孩是 B:3 和 B:7（黑）；<text:span text:style-name="T39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99">規則5</text:p>
          </table:table-cell>
          <table:table-cell table:style-name="表格115.B2" office:value-type="string">
            <text:p text:style-name="P100">✅ 成立</text:p>
          </table:table-cell>
          <table:table-cell table:style-name="表格115.C6" office:value-type="string">
            <text:p text:style-name="P95">見下方黑高計算</text:p>
          </table:table-cell>
        </table:table-row>
      </table:table>
      <text:p text:style-name="P89"/>
      <text:p text:style-name="P94">規則5 詳細計算（黑高度一致性）</text:p>
      <text:p text:style-name="P95">每條從 root 到 NIL 的路徑，計算黑色節點數（<text:span text:style-name="T11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96">【不算 NIL 的版本（教材常用）】</text:p>
            <text:p text:style-name="P96">路徑1：10(B) → 5(R) → 3(B) → NIL <text:s text:c="4"/>黑節點：10、3 <text:s text:c="4"/>= 2 個</text:p>
            <text:p text:style-name="P96">路徑2：10(B) → 5(R) → 7(B) → NIL <text:s text:c="4"/>黑節點：10、7 <text:s text:c="4"/>= 2 個</text:p>
            <text:p text:style-name="P96">路徑3：10(B) → 20(B) → NIL(左) <text:s text:c="7"/>黑節點：10、20 <text:s text:c="3"/>= 2 個</text:p>
            <text:p text:style-name="P96">路徑4：10(B) → 20(B) → 30(R) → NIL <text:s text:c="2"/>黑節點：10、20 <text:s text:c="3"/>= 2 個</text:p>
            <text:p text:style-name="P96"><text:s text:c="39"/>全部都是 2，規則5 ✔</text:p>
            <text:p text:style-name="P97"/>
            <text:p text:style-name="P96">【算 NIL 的版本（教科書正式版）】</text:p>
            <text:p text:style-name="P97"><text:soft-page-break/><text:span text:style-name="T9">路徑1：10(B) → 5(R) → 3(B) → NIL(B) <text:s/>黑節點：10、3、NIL = 3 個</text:span></text:p>
            <text:p text:style-name="P96">路徑2：10(B) → 5(R) → 7(B) → NIL(B) <text:s/>黑節點：10、7、NIL = 3 個</text:p>
            <text:p text:style-name="P96">路徑3：10(B) → 20(B) → NIL(B) <text:s text:c="8"/>黑節點：10、20、NIL= 3 個</text:p>
            <text:p text:style-name="P96">路徑4：10(B) → 20(B) → 30(R) → NIL(B)黑節點：10、20、NIL= 3 個</text:p>
            <text:p text:style-name="P96"><text:s text:c="39"/>全部都是 3，規則5 ✔</text:p>
          </table:table-cell>
        </table:table-row>
      </table:table>
      <text:p text:style-name="P89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02">📌 考試應對方式：</text:p>
            <text:p text:style-name="P91"/>
            <text:p text:style-name="P102">看到「葉節點都是黑色」→ 腦中自動翻譯成「所有 NIL 都是黑色」</text:p>
            <text:p text:style-name="P91"/>
            <text:p text:style-name="P103">看到 30(R) 是「葉子」卻是紅色 → 不要以為違規！</text:p>
            <text:p text:style-name="P102"><text:s text:c="2"/><text:span text:style-name="T16">30(R) 的正式葉節點是它下面的兩個 NIL(B)</text:span>，規則3 仍然成立。</text:p>
            <text:p text:style-name="P91"/>
            <text:p text:style-name="P102">計算黑高時：含 NIL 或不含 NIL 都可以，只要整棵樹算法一致即可。</text:p>
          </table:table-cell>
        </table:table-row>
      </table:table>
      <text:p text:style-name="P89"/>
      <text:h text:style-name="P104" text:outline-level="2">RBT-3　為什麼「顏色」能保持平衡？</text:h>
      <text:p text:style-name="P105"><text:span text:style-name="T6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06">因為紅色節點不能連續出現（規則4），</text:p>
            <text:p text:style-name="P106">最長的路徑（紅黑交替）最多是最短路徑（全黑）的 2 倍。</text:p>
            <text:p text:style-name="P107"/>
            <text:p text:style-name="P106">因此 Red-Black Tree 的高度保證在 2 × log₂(n+1) 以內</text:p>
            <text:p text:style-name="P106">→ 搜尋、插入、刪除仍然是 O(log n)</text:p>
          </table:table-cell>
        </table:table-row>
      </table:table>
      <text:p text:style-name="P108"/>
      <text:h text:style-name="P63" text:outline-level="2">RBT-4　插入後如何修復？</text:h>
      <text:p text:style-name="P109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110">如果塗黑色</text:p>
            <text:p text:style-name="P111">一定增加某條路徑的黑高</text:p>
            <text:p text:style-name="P112">違反規則5（黑高一致）</text:p>
            <text:p text:style-name="P112">→ 黑高不一致極難修復</text:p>
          </table:table-cell>
          <table:table-cell table:style-name="表格101.B1" office:value-type="string">
            <text:p text:style-name="P113">如果塗紅色 ✔</text:p>
            <text:p text:style-name="P114">黑高完全不變</text:p>
            <text:p text:style-name="P112"><text:span text:style-name="T11">只可能</text:span><text:span text:style-name="T6">違反規則4（紅紅相鄰）</text:span></text:p>
            <text:p text:style-name="P112">→ 只要<text:span text:style-name="T46">看爸爸是不是紅色即可</text:span></text:p>
          </table:table-cell>
        </table:table-row>
      </table:table>
      <text:p text:style-name="P11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16">因此插入後唯一可能的違規：自己（紅）的爸爸也是紅色</text:p>
            <text:p text:style-name="P117"/>
            <text:p text:style-name="P116">三個關鍵角色：</text:p>
            <text:p text:style-name="P116"><text:s/><text:span text:style-name="T11"><text:s/>X = 新插入節點</text:span>（<text:span text:style-name="T49">紅色</text:span>，<text:span text:style-name="T2">違規的那個</text:span>）</text:p>
            <text:p text:style-name="P116"><text:s/><text:span text:style-name="T14"><text:s/>P = X 的父節點</text:span>（<text:span text:style-name="T49">紅色</text:span><text:span text:style-name="T50">­</text:span> <text:span text:style-name="T1">→ 引發違規</text:span>）</text:p>
            <text:p text:style-name="P116"><text:s text:c="2"/>G = X 的祖父節點（一定是黑色，因為插入前整棵樹合法）</text:p>
            <text:p text:style-name="P116"><text:s text:c="2"/><text:span text:style-name="T11">U = X 的叔叔節點</text:span>（<text:span text:style-name="T8">P 的兄弟，可紅可黑</text:span>）</text:p>
          </table:table-cell>
        </table:table-row>
      </table:table>
      <text:p text:style-name="P11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118"><text:s text:c="8"/>G(B) <text:s/>← 祖父，黑色</text:p>
            <text:p text:style-name="P118"><text:s text:c="7"/>/ <text:s text:c="3"/>\</text:p>
            <text:p text:style-name="P118"><text:s text:c="5"/>P(R) <text:s text:c="2"/>U(?) <text:s/>← 叔叔，顏色決定修復方式</text:p>
            <text:p text:style-name="P118"><text:s text:c="4"/>/</text:p>
            <text:p text:style-name="P118"><text:s text:c="2"/>X(R) <text:s/>← 新節點，和 P 都是紅色，違反規則4！</text:p>
          </table:table-cell>
        </table:table-row>
      </table:table>
      <text:p text:style-name="P115"/>
      <text:p text:style-name="P119"/>
      <text:p text:style-name="P120">Case 1：<text:span text:style-name="T14">叔叔 U 是紅色</text:span> → <text:span text:style-name="T11">只改顏色</text:span>，<text:span text:style-name="T23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16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118">修復前： <text:s text:c="23"/>修復後：</text:p>
            <text:p text:style-name="P118"><text:s text:c="6"/>G(B) <text:s text:c="27"/><text:span text:style-name="T11">G(R)</text:span> ← <text:span text:style-name="T36">G 塗紅</text:span>，可能往上繼續違規</text:p>
            <text:p text:style-name="P118"><text:s text:c="5"/>/ <text:s text:c="3"/>\ <text:s text:c="25"/>/ <text:s text:c="3"/>\</text:p>
            <text:p text:style-name="P118"><text:s text:c="3"/>P(R) <text:s text:c="2"/><text:span text:style-name="T20">U(R)</text:span> <text:s text:c="9"/>→ <text:s text:c="9"/><text:span text:style-name="T11">P(B) <text:s/>U(B)</text:span> ← <text:span text:style-name="T14">兩個都塗黑</text:span></text:p>
            <text:p text:style-name="P118"><text:s text:c="3"/>/ <text:s text:c="30"/>/</text:p>
            <text:p text:style-name="P118"><text:s text:c="2"/>X(R) <text:s text:c="27"/>X(R)</text:p>
          </table:table-cell>
        </table:table-row>
      </table:table>
      <text:p text:style-name="P112">為什麼 G 要塗紅？因為 <text:span text:style-name="T51">P 和 U 都變黑，從 G 往下兩條路各多了一個黑節點</text:span>，</text:p>
      <text:p text:style-name="P112"><text:span text:style-name="T52">必須把 G 塗紅來補償黑高</text:span>，<text:span text:style-name="T30">讓規則5維持不變</text:span>。但 G 變紅後可能和 G 的父節點</text:p>
      <text:p text:style-name="P112">又違反規則4，所以要往上繼續檢查，直到 root 或不再違規為止。</text:p>
      <text:p text:style-name="P115"/>
      <text:p text:style-name="P109">Case 2：<text:span text:style-name="T14">叔叔 U 是黑色</text:span>，<text:span text:style-name="T1">且 X 是 P 的右子</text:span> → <text:span text:style-name="T23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16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118">修復前： <text:s text:c="23"/><text:span text:style-name="T6">對 P 左旋後</text:span>（變 Case 3）：</text:p>
            <text:p text:style-name="P118"><text:s text:c="6"/>G(B) <text:s text:c="27"/>G(B)</text:p>
            <text:p text:style-name="P118"><text:s text:c="5"/>/ <text:s text:c="3"/>\ <text:s text:c="25"/>/ <text:s text:c="3"/>\</text:p>
            <text:p text:style-name="P118"><text:s text:c="3"/>P(R) <text:s text:c="2"/><text:span text:style-name="T20">U(B)</text:span> <text:s text:c="9"/>→ <text:s text:c="9"/>X(R) <text:s text:c="2"/><text:span text:style-name="T11">U(B)</text:span></text:p>
            <text:p text:style-name="P118"><text:s text:c="6"/>\ <text:s text:c="27"/>/</text:p>
            <text:p text:style-name="P118"><text:s text:c="6"/>X(R) ← <text:span text:style-name="T36">X 在右邊</text:span> <text:s text:c="11"/><text:span text:style-name="T8">P(R)</text:span> ← <text:span text:style-name="T36">P 跑下去了</text:span></text:p>
            <text:p text:style-name="P121"/>
            <text:p text:style-name="P122">← 旋轉後：P 在 X 的左邊，符合 Case 3 格局，接著用 Case 3 修復</text:p>
          </table:table-cell>
        </table:table-row>
      </table:table>
      <text:p text:style-name="P115"/>
      <text:p text:style-name="P109">Case 3：<text:span text:style-name="T14">叔叔 U 是黑色</text:span>，<text:span text:style-name="T39">且 X 是 P 的左子</text:span> → <text:span text:style-name="T53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123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118">修復前： <text:s text:c="23"/><text:span text:style-name="T6">對 G 右旋</text:span> + <text:span text:style-name="T8">交換 P/G 顏色</text:span>：</text:p>
            <text:p text:style-name="P118"><text:s text:c="6"/>G(B) <text:s text:c="27"/><text:span text:style-name="T21">P(B)</text:span> ← <text:span text:style-name="T16">原本紅色</text:span>，現在黑色（當新根）</text:p>
            <text:p text:style-name="P118"><text:s text:c="5"/>/ <text:s text:c="3"/>\ <text:s text:c="25"/>/ <text:s text:c="3"/>\</text:p>
            <text:p text:style-name="P118"><text:s text:c="3"/>P(R) <text:s text:c="2"/><text:span text:style-name="T20">U(B)</text:span> <text:s text:c="9"/>→ <text:s text:c="9"/>X(R) <text:s/><text:span text:style-name="T21">G(R)</text:span> ← <text:span text:style-name="T3">原本黑色</text:span>，現在紅色</text:p>
            <text:p text:style-name="P118"><text:s text:c="3"/>/ <text:s text:c="40"/>\</text:p>
            <text:p text:style-name="P118"><text:s text:c="2"/>X(R) <text:s text:c="38"/>U(B)</text:p>
            <text:p text:style-name="P121"/>
            <text:p text:style-name="P118">← P 變黑頂替 G 的位置，黑高不變；G 變紅但右子是 U(B)，不違反規則4</text:p>
            <text:p text:style-name="P118">← 整個子樹修復完成，不需要繼續往上檢查！</text:p>
          </table:table-cell>
        </table:table-row>
      </table:table>
      <text:p text:style-name="P115"/>
      <text:p text:style-name="P109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24">Case</text:p>
          </table:table-cell>
          <table:table-cell table:style-name="表格123.A1" office:value-type="string">
            <text:p text:style-name="P124">叔叔顏色</text:p>
          </table:table-cell>
          <table:table-cell table:style-name="表格123.A1" office:value-type="string">
            <text:p text:style-name="P124">X 的位置</text:p>
          </table:table-cell>
          <table:table-cell table:style-name="表格123.A1" office:value-type="string">
            <text:p text:style-name="P124">操作</text:p>
          </table:table-cell>
          <table:table-cell table:style-name="表格123.A1" office:value-type="string">
            <text:p text:style-name="P124">繼續往上？</text:p>
          </table:table-cell>
        </table:table-row>
        <table:table-row table:style-name="表格123.1">
          <table:table-cell table:style-name="表格123.A2" office:value-type="string">
            <text:p text:style-name="P125">Case 1</text:p>
          </table:table-cell>
          <table:table-cell table:style-name="表格123.B2" office:value-type="string">
            <text:p text:style-name="P126">紅</text:p>
          </table:table-cell>
          <table:table-cell table:style-name="表格123.C2" office:value-type="string">
            <text:p text:style-name="P112">左或右皆可</text:p>
          </table:table-cell>
          <table:table-cell table:style-name="表格123.D2" office:value-type="string">
            <text:p text:style-name="P112">P、U 塗黑；G 塗紅</text:p>
          </table:table-cell>
          <table:table-cell table:style-name="表格123.E2" office:value-type="string">
            <text:p text:style-name="P127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25">Case 2</text:p>
          </table:table-cell>
          <table:table-cell table:style-name="表格123.B3" office:value-type="string">
            <text:p text:style-name="P128">黑</text:p>
          </table:table-cell>
          <table:table-cell table:style-name="表格123.C3" office:value-type="string">
            <text:p text:style-name="P129">P 的右子</text:p>
          </table:table-cell>
          <table:table-cell table:style-name="表格123.D3" office:value-type="string">
            <text:p text:style-name="P112">對 P 左旋 → <text:span text:style-name="T6">變 Case 3</text:span></text:p>
          </table:table-cell>
          <table:table-cell table:style-name="表格123.A1" office:value-type="string">
            <text:p text:style-name="P125">接著 Case 3</text:p>
          </table:table-cell>
        </table:table-row>
        <table:table-row table:style-name="表格123.1">
          <table:table-cell table:style-name="表格123.A4" office:value-type="string">
            <text:p text:style-name="P125">Case 3</text:p>
          </table:table-cell>
          <table:table-cell table:style-name="表格123.B4" office:value-type="string">
            <text:p text:style-name="P128">黑</text:p>
          </table:table-cell>
          <table:table-cell table:style-name="表格123.C4" office:value-type="string">
            <text:p text:style-name="P130">P 的左子</text:p>
          </table:table-cell>
          <table:table-cell table:style-name="表格123.D4" office:value-type="string">
            <text:p text:style-name="P112">對 G 右旋 + <text:span text:style-name="T8">交換 P/G 顏色</text:span></text:p>
          </table:table-cell>
          <table:table-cell table:style-name="表格123.E4" office:value-type="string">
            <text:p text:style-name="P131">❌ 完成！</text:p>
          </table:table-cell>
        </table:table-row>
      </table:table>
      <text:p text:style-name="P11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132">⚠️ <text:span text:style-name="T11">以上三個 Case 的前提</text:span>：<text:span text:style-name="T16">P 是 G 的左子節點</text:span></text:p>
            <text:p text:style-name="P132"><text:span text:style-name="T32">若 P 是 G 的右子節點 → 做法完全對稱</text:span>（左右鏡像互換）：</text:p>
            <text:p text:style-name="P133"><text:s text:c="2"/>Case 2 變成：<text:span text:style-name="T1">X 在 P 的右子</text:span> → <text:span text:style-name="T3">對 P 左旋</text:span></text:p>
            <text:p text:style-name="P133"><text:s text:c="2"/>Case 3 變成：<text:span text:style-name="T54">X 在 P 的左子</text:span> → <text:span text:style-name="T3">對 G 右旋</text:span> + <text:span text:style-name="T8">交換顏色</text:span></text:p>
            <text:p text:style-name="P117"/>
            <text:p text:style-name="P132">最後一步：無論哪個 Case，修復結束後強制把 root 塗成黑色（規則2）。</text:p>
          </table:table-cell>
        </table:table-row>
      </table:table>
      <text:p text:style-name="P115"/>
      <text:h text:style-name="P63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79">比較項目</text:p>
          </table:table-cell>
          <table:table-cell table:style-name="表格102.B1" office:value-type="string">
            <text:p text:style-name="P134">AVL Tree</text:p>
          </table:table-cell>
          <table:table-cell table:style-name="表格102.C1" office:value-type="string">
            <text:p text:style-name="P135">Red-Black Tree</text:p>
          </table:table-cell>
        </table:table-row>
        <table:table-row table:style-name="表格102.1">
          <table:table-cell table:style-name="表格102.A2" office:value-type="string">
            <text:p text:style-name="P79">是否為二元樹</text:p>
          </table:table-cell>
          <table:table-cell table:style-name="表格102.B2" office:value-type="string">
            <text:p text:style-name="P69">✔ 是</text:p>
          </table:table-cell>
          <table:table-cell table:style-name="表格102.C2" office:value-type="string">
            <text:p text:style-name="P69">✔ 是</text:p>
          </table:table-cell>
        </table:table-row>
        <table:table-row table:style-name="表格102.1">
          <table:table-cell table:style-name="表格102.A2" office:value-type="string">
            <text:p text:style-name="P79">是否為 BST</text:p>
          </table:table-cell>
          <table:table-cell table:style-name="表格102.B3" office:value-type="string">
            <text:p text:style-name="P69">✔ 是</text:p>
          </table:table-cell>
          <table:table-cell table:style-name="表格102.C3" office:value-type="string">
            <text:p text:style-name="P69">✔ 是</text:p>
          </table:table-cell>
        </table:table-row>
        <table:table-row table:style-name="表格102.1">
          <table:table-cell table:style-name="表格102.A2" office:value-type="string">
            <text:p text:style-name="P79">平衡機制</text:p>
          </table:table-cell>
          <table:table-cell table:style-name="表格102.B4" office:value-type="string">
            <text:p text:style-name="P69">嚴格高度差 ≤ 1</text:p>
          </table:table-cell>
          <table:table-cell table:style-name="表格102.C4" office:value-type="string">
            <text:p text:style-name="P69">顏色規則</text:p>
          </table:table-cell>
        </table:table-row>
        <table:table-row table:style-name="表格102.1">
          <table:table-cell table:style-name="表格102.A2" office:value-type="string">
            <text:p text:style-name="P79">平衡程度</text:p>
          </table:table-cell>
          <table:table-cell table:style-name="表格102.B5" office:value-type="string">
            <text:p text:style-name="P69">更嚴格（更矮）</text:p>
          </table:table-cell>
          <table:table-cell table:style-name="表格102.C5" office:value-type="string">
            <text:p text:style-name="P69">較寬鬆（可略高）</text:p>
          </table:table-cell>
        </table:table-row>
        <table:table-row table:style-name="表格102.1">
          <table:table-cell table:style-name="表格102.A2" office:value-type="string">
            <text:p text:style-name="P79">搜尋速度</text:p>
          </table:table-cell>
          <table:table-cell table:style-name="表格102.B6" office:value-type="string">
            <text:p text:style-name="P136">略快</text:p>
          </table:table-cell>
          <table:table-cell table:style-name="表格102.C6" office:value-type="string">
            <text:p text:style-name="P137">略慢</text:p>
          </table:table-cell>
        </table:table-row>
        <table:table-row table:style-name="表格102.1">
          <table:table-cell table:style-name="表格102.A2" office:value-type="string">
            <text:p text:style-name="P79">插入/刪除速度</text:p>
          </table:table-cell>
          <table:table-cell table:style-name="表格102.B7" office:value-type="string">
            <text:p text:style-name="P69">較慢（旋轉多）</text:p>
          </table:table-cell>
          <table:table-cell table:style-name="表格102.C7" office:value-type="string">
            <text:p text:style-name="P69">較快（旋轉少）</text:p>
          </table:table-cell>
        </table:table-row>
        <table:table-row table:style-name="表格102.1">
          <table:table-cell table:style-name="表格102.A2" office:value-type="string">
            <text:p text:style-name="P79">適合場景</text:p>
          </table:table-cell>
          <table:table-cell table:style-name="表格102.B8" office:value-type="string">
            <text:p text:style-name="P138">讀多寫少</text:p>
          </table:table-cell>
          <table:table-cell table:style-name="表格102.C8" office:value-type="string">
            <text:p text:style-name="P139">讀寫頻繁</text:p>
          </table:table-cell>
        </table:table-row>
        <table:table-row table:style-name="表格102.1">
          <table:table-cell table:style-name="表格102.A2" office:value-type="string">
            <text:p text:style-name="P79">實際應用</text:p>
          </table:table-cell>
          <table:table-cell table:style-name="表格102.B9" office:value-type="string">
            <text:p text:style-name="P69">少數特殊場景</text:p>
          </table:table-cell>
          <table:table-cell table:style-name="表格102.C9" office:value-type="string">
            <text:p text:style-name="P69">C++ map、Java TreeMap、Linux 排程</text:p>
          </table:table-cell>
        </table:table-row>
      </table:table>
      <text:p text:style-name="P66"/>
      <text:h text:style-name="P67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4">⚠️ <text:span text:style-name="T8">B-Tree 不是二元樹！</text:span></text:p>
            <text:p text:style-name="P64">Binary Tree = 每個節點最多 2 個子節點</text:p>
            <text:p text:style-name="P64"><text:span text:style-name="T36">B-Tree </text:span>= <text:span text:style-name="T11">每個節點</text:span>可以<text:span text:style-name="T55">有很多個 key </text:span>和<text:span text:style-name="T56">很多個子節點</text:span>（階數決定上限）</text:p>
            <text:p text:style-name="P64">B-Tree 是「<text:span text:style-name="T57">多元搜尋樹（M-ary Search Tree）</text:span>」</text:p>
          </table:table-cell>
        </table:table-row>
      </table:table>
      <text:p text:style-name="P65"/>
      <text:h text:style-name="P63" text:outline-level="2">BT-1　為什麼要發明 B-Tree？</text:h>
      <text:p text:style-name="P69">回憶 <text:span text:style-name="T58">BST 和 AVL Tree 的問題</text:span>：<text:span text:style-name="T8">它們都假設資料在</text:span><text:span text:style-name="T59">記憶體（RAM）</text:span><text:span text:style-name="T8">裡</text:span>。</text:p>
      <text:p text:style-name="P69">但<text:span text:style-name="T16">資料庫的資料放在</text:span><text:span text:style-name="T59">硬碟（Disk）</text:span><text:span text:style-name="T16">上</text:span>，<text:span text:style-name="T60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4"><text:span text:style-name="T11">RAM <text:s/>讀取速度</text:span>：奈秒（ns）級，約 <text:span text:style-name="T11">100 ns</text:span></text:p>
            <text:p text:style-name="P64"><text:span text:style-name="T11">磁碟 讀取速度</text:span>：毫秒（ms）級，約 <text:span text:style-name="T11">5~10 ms</text:span></text:p>
            <text:p text:style-name="P71"/>
            <text:p text:style-name="P140">磁碟比 RAM 慢約 100,000 倍！</text:p>
            <text:p text:style-name="P71"/>
            <text:p text:style-name="P64">BST 有 100 萬筆資料 → 需要 log₂(1,000,000) ≈ 20 次磁碟讀取</text:p>
            <text:p text:style-name="P64">B-Tree（階數500）→ 只需 log₅₀₀(1,000,000) ≈ 4 次磁碟讀取</text:p>
            <text:p text:style-name="P64">→ B-Tree 讓磁碟讀取次數從 20 降到 4，快了 5 倍！</text:p>
          </table:table-cell>
        </table:table-row>
      </table:table>
      <text:p text:style-name="P65"/>
      <text:h text:style-name="P63" text:outline-level="2">BT-2　B-Tree 的結構</text:h>
      <text:p text:style-name="P69"><text:span text:style-name="T11">B-Tree 的核心概念</text:span>：<text:span text:style-name="T8">把很多 key 塞進同一個節點</text:span>，<text:span text:style-name="T61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72">B-Tree 的「<text:span text:style-name="T62">階數（Order）m</text:span>」定義了節點的上限：</text:p>
            <text:p text:style-name="P72"><text:s text:c="2"/><text:span text:style-name="T11">每個節點</text:span><text:span text:style-name="T63">最多 m 個子節點</text:span>，<text:span text:style-name="T6">最多 m-1 個 key</text:span></text:p>
            <text:p text:style-name="P72"><text:s text:c="2"/><text:span text:style-name="T17">每個非 root 節點</text:span><text:span text:style-name="T64">最少 ⌈m/2⌉ 個子節點</text:span></text:p>
          </table:table-cell>
        </table:table-row>
      </table:table>
      <text:p text:style-name="P65"/>
      <text:p text:style-name="P69">以「<text:span text:style-name="T20">3 階</text:span> B-Tree」為例（每個節點最多 <text:span text:style-name="T20">2 個 key</text:span>、<text:span text:style-name="T20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74"><text:s text:c="17"/><text:span text:style-name="T14">[20 | 50] </text:span><text:s text:c="15"/>← root，有<text:span text:style-name="T14"> 2 個 key</text:span></text:p>
            <text:p text:style-name="P74"><text:s text:c="16"/>/ <text:s text:c="3"/>| <text:s text:c="3"/>\</text:p>
            <text:p text:style-name="P74"><text:s text:c="11"/>[10] <text:s text:c="2"/>[30|40] <text:s text:c="2"/>[60|70|80]</text:p>
            <text:p text:style-name="P74"><text:s text:c="11"/>↑ <text:s text:c="8"/>↑ <text:s text:c="10"/>↑</text:p>
            <text:p text:style-name="P74"><text:s text:c="9"/>子節點1 <text:s/>子節點2 <text:s text:c="4"/>子節點3</text:p>
            <text:p text:style-name="P78"/>
            <text:p text:style-name="P74">規則（<text:span text:style-name="T8">同 BST 概念，但擴展到多個 key</text:span>）：</text:p>
            <text:p text:style-name="P74"><text:s text:c="2"/>子節點1 的值 &lt; 20</text:p>
            <text:p text:style-name="P74"><text:s text:c="2"/>20 &lt; 子節點2 的值 &lt; 50</text:p>
            <text:p text:style-name="P74"><text:s text:c="2"/>子節點3 的值 &gt; 50</text:p>
          </table:table-cell>
        </table:table-row>
      </table:table>
      <text:p text:style-name="P65"/>
      <text:h text:style-name="P141" text:outline-level="2"><text:soft-page-break/><text:span text:style-name="T65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134">性質</text:p>
          </table:table-cell>
          <table:table-cell table:style-name="表格107.A1" office:value-type="string">
            <text:p text:style-name="P134">說明</text:p>
          </table:table-cell>
        </table:table-row>
        <table:table-row table:style-name="表格107.1">
          <table:table-cell table:style-name="表格107.A2" office:value-type="string">
            <text:p text:style-name="P142">所有葉節點在同一層</text:p>
          </table:table-cell>
          <table:table-cell table:style-name="表格107.B2" office:value-type="string">
            <text:p text:style-name="P69"><text:span text:style-name="T20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43">每次搜尋保證 O(log n)</text:p>
          </table:table-cell>
          <table:table-cell table:style-name="表格107.B3" office:value-type="string">
            <text:p text:style-name="P69">雖然底數是 m，<text:span text:style-name="T66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44">節點飽滿時自動分裂</text:p>
          </table:table-cell>
          <table:table-cell table:style-name="表格107.B4" office:value-type="string">
            <text:p text:style-name="P69"><text:span text:style-name="T16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134">自動合併</text:p>
          </table:table-cell>
          <table:table-cell table:style-name="表格107.B5" office:value-type="string">
            <text:p text:style-name="P69">刪除後若節點太少，與兄弟合併或借 key</text:p>
          </table:table-cell>
        </table:table-row>
      </table:table>
      <text:p text:style-name="P65"/>
      <text:h text:style-name="P63" text:outline-level="2">BT-4　B+Tree（資料庫最常用）</text:h>
      <text:p text:style-name="P69"><text:span text:style-name="T47">B+Tree</text:span><text:span text:style-name="T20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145">B-Tree</text:p>
            <text:list text:style-name="WWNum2">
              <text:list-item text:start-value="1">
                <text:p text:style-name="P146">所有節點都存 key 和 data</text:p>
              </text:list-item>
              <text:list-item>
                <text:p text:style-name="P147">搜尋可能在中間節點就結束</text:p>
              </text:list-item>
              <text:list-item>
                <text:p text:style-name="P148">範圍查詢效率較低</text:p>
              </text:list-item>
            </text:list>
          </table:table-cell>
          <table:table-cell table:style-name="表格108.B1" office:value-type="string">
            <text:p text:style-name="P145">B+Tree</text:p>
            <text:list text:continue-numbering="true" text:style-name="WWNum2">
              <text:list-item>
                <text:p text:style-name="P149"><text:span text:style-name="T32">內部節點只存 key</text:span>，<text:span text:style-name="T28">data 只放葉節點</text:span></text:p>
              </text:list-item>
              <text:list-item>
                <text:p text:style-name="P147">搜尋一定走到葉節點才結束</text:p>
              </text:list-item>
              <text:list-item>
                <text:p text:style-name="P149"><text:span text:style-name="T8">所有葉節點串成一條 Linked List</text:span>，範圍查詢超快</text:p>
              </text:list-item>
            </text:list>
          </table:table-cell>
        </table:table-row>
      </table:table>
      <text:p text:style-name="P65"/>
      <text:p text:style-name="P69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4"><text:s text:c="2"/>... ← [10|data] ↔ [20|data] ↔ [30|data] ↔ [40|data] → ...</text:p>
            <text:p text:style-name="P74"><text:s text:c="10"/>↑ 所有葉節點左右串聯，SELECT * WHERE key BETWEEN 20 AND 40</text:p>
            <text:p text:style-name="P74"><text:s text:c="12"/>只需找到 20，然後沿著鏈結直接讀到 40，不需再搜尋！</text:p>
          </table:table-cell>
        </table:table-row>
      </table:table>
      <text:p text:style-name="P65"/>
      <text:h text:style-name="P63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4">應用場景</text:p>
          </table:table-cell>
          <table:table-cell table:style-name="表格110.A1" office:value-type="string">
            <text:p text:style-name="P134">使用的樹</text:p>
          </table:table-cell>
          <table:table-cell table:style-name="表格110.A1" office:value-type="string">
            <text:p text:style-name="P134">原因</text:p>
          </table:table-cell>
        </table:table-row>
        <table:table-row table:style-name="表格110.1">
          <table:table-cell table:style-name="表格110.A2" office:value-type="string">
            <text:p text:style-name="P134">MySQL InnoDB</text:p>
          </table:table-cell>
          <table:table-cell table:style-name="表格110.B2" office:value-type="string">
            <text:p text:style-name="P69">B+Tree</text:p>
          </table:table-cell>
          <table:table-cell table:style-name="表格110.C2" office:value-type="string">
            <text:p text:style-name="P69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134">PostgreSQL</text:p>
          </table:table-cell>
          <table:table-cell table:style-name="表格110.B3" office:value-type="string">
            <text:p text:style-name="P69">B+Tree</text:p>
          </table:table-cell>
          <table:table-cell table:style-name="表格110.C3" office:value-type="string">
            <text:p text:style-name="P69">主索引標準結構</text:p>
          </table:table-cell>
        </table:table-row>
        <table:table-row table:style-name="表格110.1">
          <table:table-cell table:style-name="表格110.A4" office:value-type="string">
            <text:p text:style-name="P134">SQLite</text:p>
          </table:table-cell>
          <table:table-cell table:style-name="表格110.B4" office:value-type="string">
            <text:p text:style-name="P69">B+Tree</text:p>
          </table:table-cell>
          <table:table-cell table:style-name="表格110.C4" office:value-type="string">
            <text:p text:style-name="P69">嵌入式資料庫標準</text:p>
          </table:table-cell>
        </table:table-row>
        <table:table-row table:style-name="表格110.1">
          <table:table-cell table:style-name="表格110.A5" office:value-type="string">
            <text:p text:style-name="P134">NTFS 檔案系統</text:p>
          </table:table-cell>
          <table:table-cell table:style-name="表格110.B5" office:value-type="string">
            <text:p text:style-name="P69">B+Tree</text:p>
          </table:table-cell>
          <table:table-cell table:style-name="表格110.C5" office:value-type="string">
            <text:p text:style-name="P69">目錄樹搜尋</text:p>
          </table:table-cell>
        </table:table-row>
        <table:table-row table:style-name="表格110.1">
          <table:table-cell table:style-name="表格110.A6" office:value-type="string">
            <text:p text:style-name="P134">ext4 檔案系統</text:p>
          </table:table-cell>
          <table:table-cell table:style-name="表格110.B6" office:value-type="string">
            <text:p text:style-name="P69">HTree（B-Tree衍生）</text:p>
          </table:table-cell>
          <table:table-cell table:style-name="表格110.C6" office:value-type="string">
            <text:p text:style-name="P69">大目錄索引</text:p>
          </table:table-cell>
        </table:table-row>
      </table:table>
      <text:p text:style-name="P65"/>
      <text:h text:style-name="P141" text:outline-level="2"><text:soft-page-break/><text:span text:style-name="T65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79">比較項目</text:p>
          </table:table-cell>
          <table:table-cell table:style-name="表格111.B1" office:value-type="string">
            <text:p text:style-name="P134">AVL Tree</text:p>
          </table:table-cell>
          <table:table-cell table:style-name="表格111.C1" office:value-type="string">
            <text:p text:style-name="P135">Red-Black Tree</text:p>
          </table:table-cell>
          <table:table-cell table:style-name="表格111.B1" office:value-type="string">
            <text:p text:style-name="P134">B-Tree / B+Tree</text:p>
          </table:table-cell>
        </table:table-row>
        <table:table-row table:style-name="表格111.1">
          <table:table-cell table:style-name="表格111.A2" office:value-type="string">
            <text:p text:style-name="P79">是否為二元樹</text:p>
          </table:table-cell>
          <table:table-cell table:style-name="表格111.B2" office:value-type="string">
            <text:p text:style-name="P81">✔ 是</text:p>
          </table:table-cell>
          <table:table-cell table:style-name="表格111.C2" office:value-type="string">
            <text:p text:style-name="P81">✔ 是</text:p>
          </table:table-cell>
          <table:table-cell table:style-name="表格111.D2" office:value-type="string">
            <text:p text:style-name="P81">✘ 否（多元樹）</text:p>
          </table:table-cell>
        </table:table-row>
        <table:table-row table:style-name="表格111.1">
          <table:table-cell table:style-name="表格111.A2" office:value-type="string">
            <text:p text:style-name="P79">是否為 BST</text:p>
          </table:table-cell>
          <table:table-cell table:style-name="表格111.B3" office:value-type="string">
            <text:p text:style-name="P150">✔ 是</text:p>
          </table:table-cell>
          <table:table-cell table:style-name="表格111.C3" office:value-type="string">
            <text:p text:style-name="P150">✔ 是</text:p>
          </table:table-cell>
          <table:table-cell table:style-name="表格111.D3" office:value-type="string">
            <text:p text:style-name="P150">✔ 類似（多 key）</text:p>
          </table:table-cell>
        </table:table-row>
        <table:table-row table:style-name="表格111.1">
          <table:table-cell table:style-name="表格111.A2" office:value-type="string">
            <text:p text:style-name="P79">每節點子節點數</text:p>
          </table:table-cell>
          <table:table-cell table:style-name="表格111.B4" office:value-type="string">
            <text:p text:style-name="P151">最多 2</text:p>
          </table:table-cell>
          <table:table-cell table:style-name="表格111.C4" office:value-type="string">
            <text:p text:style-name="P151">最多 2</text:p>
          </table:table-cell>
          <table:table-cell table:style-name="表格111.D4" office:value-type="string">
            <text:p text:style-name="P151">最多 m（階數）</text:p>
          </table:table-cell>
        </table:table-row>
        <table:table-row table:style-name="表格111.1">
          <table:table-cell table:style-name="表格111.A2" office:value-type="string">
            <text:p text:style-name="P79">平衡方式</text:p>
          </table:table-cell>
          <table:table-cell table:style-name="表格111.B5" office:value-type="string">
            <text:p text:style-name="P69">BF ≤ 1（旋轉）</text:p>
          </table:table-cell>
          <table:table-cell table:style-name="表格111.C5" office:value-type="string">
            <text:p text:style-name="P69">顏色規則（旋轉）</text:p>
          </table:table-cell>
          <table:table-cell table:style-name="表格111.D5" office:value-type="string">
            <text:p text:style-name="P69">節點分裂/合併</text:p>
          </table:table-cell>
        </table:table-row>
        <table:table-row table:style-name="表格111.1">
          <table:table-cell table:style-name="表格111.A2" office:value-type="string">
            <text:p text:style-name="P79">高度</text:p>
          </table:table-cell>
          <table:table-cell table:style-name="表格111.B6" office:value-type="string">
            <text:p text:style-name="P69">最矮</text:p>
          </table:table-cell>
          <table:table-cell table:style-name="表格111.C6" office:value-type="string">
            <text:p text:style-name="P69">略高</text:p>
          </table:table-cell>
          <table:table-cell table:style-name="表格111.D6" office:value-type="string">
            <text:p text:style-name="P69">很矮（底數大）</text:p>
          </table:table-cell>
        </table:table-row>
        <table:table-row table:style-name="表格111.1">
          <table:table-cell table:style-name="表格111.A2" office:value-type="string">
            <text:p text:style-name="P79">搜尋</text:p>
          </table:table-cell>
          <table:table-cell table:style-name="表格111.B7" office:value-type="string">
            <text:p text:style-name="P152">O(log n)</text:p>
          </table:table-cell>
          <table:table-cell table:style-name="表格111.C7" office:value-type="string">
            <text:p text:style-name="P152">O(log n)</text:p>
          </table:table-cell>
          <table:table-cell table:style-name="表格111.D7" office:value-type="string">
            <text:p text:style-name="P152">O(log n)，I/O少</text:p>
          </table:table-cell>
        </table:table-row>
        <table:table-row table:style-name="表格111.1">
          <table:table-cell table:style-name="表格111.A2" office:value-type="string">
            <text:p text:style-name="P79">插入/刪除</text:p>
          </table:table-cell>
          <table:table-cell table:style-name="表格111.B8" office:value-type="string">
            <text:p text:style-name="P69">O(log n)，旋轉多</text:p>
          </table:table-cell>
          <table:table-cell table:style-name="表格111.C8" office:value-type="string">
            <text:p text:style-name="P69">O(log n)，旋轉少</text:p>
          </table:table-cell>
          <table:table-cell table:style-name="表格111.D8" office:value-type="string">
            <text:p text:style-name="P69">O(log n)，分裂/合併</text:p>
          </table:table-cell>
        </table:table-row>
        <table:table-row table:style-name="表格111.1">
          <table:table-cell table:style-name="表格111.A2" office:value-type="string">
            <text:p text:style-name="P79">存放位置</text:p>
          </table:table-cell>
          <table:table-cell table:style-name="表格111.B9" office:value-type="string">
            <text:p text:style-name="P153">記憶體</text:p>
          </table:table-cell>
          <table:table-cell table:style-name="表格111.C9" office:value-type="string">
            <text:p text:style-name="P153">記憶體</text:p>
          </table:table-cell>
          <table:table-cell table:style-name="表格111.D9" office:value-type="string">
            <text:p text:style-name="P153">磁碟（資料庫）</text:p>
          </table:table-cell>
        </table:table-row>
        <table:table-row table:style-name="表格111.1">
          <table:table-cell table:style-name="表格111.A2" office:value-type="string">
            <text:p text:style-name="P79">主要應用</text:p>
          </table:table-cell>
          <table:table-cell table:style-name="表格111.B10" office:value-type="string">
            <text:p text:style-name="P69">特殊記憶體搜尋</text:p>
          </table:table-cell>
          <table:table-cell table:style-name="表格111.C10" office:value-type="string">
            <text:p text:style-name="P69">C++ map / Java / Linux</text:p>
          </table:table-cell>
          <table:table-cell table:style-name="表格111.D10" office:value-type="string">
            <text:p text:style-name="P69">資料庫索引、檔案系統</text:p>
          </table:table-cell>
        </table:table-row>
      </table:table>
      <text:p text:style-name="P65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83">🎯 核心記憶口訣：</text:p>
            <text:p text:style-name="P83">AVL Tree = <text:span text:style-name="T20">二元樹</text:span><text:span text:style-name="T67"> </text:span>+ 嚴格平衡（BF ≤ 1）→ 讀多寫少場景</text:p>
            <text:p text:style-name="P83">Red-Black Tree = <text:span text:style-name="T20">二元樹 </text:span>+ 顏色規則 → 讀寫平衡場景（最常用）</text:p>
            <text:p text:style-name="P83">B-Tree = <text:span text:style-name="T20">多元樹</text:span> + 磁碟優化 → 資料庫/檔案系統（不是二元樹！）</text:p>
          </table:table-cell>
        </table:table-row>
      </table:table>
      <text:p text:style-name="P154"/>
      <text:h text:style-name="P7" text:outline-level="1">第四章：樹的走訪（Traversal）</text:h>
      <text:p text:style-name="P8">走訪 = 「按照某種順序，把樹上每個節點拜訪一次」。共有四種主要方法。</text:p>
      <text:p text:style-name="P1"/>
      <text:h text:style-name="P9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0"><text:s text:c="9"/>A</text:p>
            <text:p text:style-name="P10"><text:s text:c="8"/>/ \</text:p>
            <text:p text:style-name="P10"><text:s text:c="7"/>B <text:s text:c="2"/>C</text:p>
            <text:p text:style-name="P10"><text:s text:c="6"/>/ \</text:p>
            <text:p text:style-name="P10"><text:s text:c="5"/>D <text:s text:c="2"/>E</text:p>
          </table:table-cell>
        </table:table-row>
      </table:table>
      <text:p text:style-name="P1"/>
      <text:h text:style-name="P9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5">DFS = Depth First Search = 一路鑽到底，再回頭</text:p>
          </table:table-cell>
        </table:table-row>
      </table:table>
      <text:p text:style-name="P1"/>
      <text:p text:style-name="P38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0">步驟：A → B → D → （D沒子節點，回） → E → （回到B完成） → C</text:p>
            <text:p text:style-name="P10">結果：A <text:s/>B <text:s/>D <text:s/>E <text:s/>C</text:p>
            <text:p text:style-name="P1"/>
            <text:p text:style-name="P10">口訣：「先吃主食（根），再吃左菜，最後右菜」</text:p>
          </table:table-cell>
        </table:table-row>
      </table:table>
      <text:p text:style-name="P38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0">步驟：D → B → E → A → C</text:p>
            <text:p text:style-name="P10">結果：D <text:s/>B <text:s/>E <text:s/>A <text:s/>C</text:p>
            <text:p text:style-name="P1"/>
            <text:p text:style-name="P10">口訣：「先左邊的人說話，主人（根）再說，最後右邊說」</text:p>
            <text:p text:style-name="P10">特性：BST 的 Inorder 結果 = 遞增排序！</text:p>
          </table:table-cell>
        </table:table-row>
      </table:table>
      <text:p text:style-name="P38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0">步驟：D → E → B → C → A</text:p>
            <text:p text:style-name="P10">結果：D <text:s/>E <text:s/>B <text:s/>C <text:s/>A</text:p>
            <text:p text:style-name="P1"/>
            <text:p text:style-name="P10">口訣：「最後才輪到主人（根）說話」</text:p>
            <text:p text:style-name="P10">應用：計算樹的大小時常用（先算子樹，再算自己）</text:p>
          </table:table-cell>
        </table:table-row>
      </table:table>
      <text:p text:style-name="P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55">走訪方式</text:p>
            <text:p text:style-name="P8">Preorder（前序）</text:p>
            <text:p text:style-name="P8">Inorder（中序）</text:p>
            <text:p text:style-name="P8">Postorder（後序）</text:p>
          </table:table-cell>
          <table:table-cell table:style-name="表格24.B1" office:value-type="string">
            <text:p text:style-name="P155">結果</text:p>
            <text:p text:style-name="P8">A B D E C</text:p>
            <text:p text:style-name="P8">D B E A C</text:p>
            <text:p text:style-name="P8">D E B C A</text:p>
          </table:table-cell>
        </table:table-row>
      </table:table>
      <text:p text:style-name="P1"/>
      <text:h text:style-name="P156" text:outline-level="2"><text:soft-page-break/><text:span text:style-name="T65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57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0">第1層：A</text:p>
            <text:p text:style-name="P10">第2層：B <text:s/>C</text:p>
            <text:p text:style-name="P10">第3層：D <text:s/>E</text:p>
            <text:p text:style-name="P1"/>
            <text:p text:style-name="P10">Level-order 結果：A <text:s/>B <text:s/>C <text:s/>D <text:s/>E</text:p>
          </table:table-cell>
        </table:table-row>
      </table:table>
      <text:p text:style-name="P8">BFS 使用 Queue（先進先出）：先把 A 放入 Queue → 取出 A，放入 B、C → 取出 B，放入 D、E → 取出 C（無子節點）→ 取出 D → 取出 E</text:p>
      <text:p text:style-name="P1"/>
      <text:h text:style-name="P9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55">DFS（深度優先）</text:p>
            <text:p text:style-name="P8">一路往深處鑽</text:p>
            <text:p text:style-name="P8">使用 Stack（堆疊）/ 遞迴</text:p>
            <text:p text:style-name="P8">三種：Preorder / Inorder / Postorder</text:p>
            <text:p text:style-name="P8">應用：樹走訪、Backtracking、路徑搜尋</text:p>
          </table:table-cell>
          <table:table-cell table:style-name="表格26.B1" office:value-type="string">
            <text:p text:style-name="P155">BFS（廣度優先）</text:p>
            <text:p text:style-name="P8">一層一層掃描</text:p>
            <text:p text:style-name="P8">使用 Queue（佇列）</text:p>
            <text:p text:style-name="P8">一種：Level-order</text:p>
            <text:p text:style-name="P8">應用：最短路徑、社交網路距離</text:p>
          </table:table-cell>
        </table:table-row>
      </table:table>
      <text:p text:style-name="P1"/>
      <text:h text:style-name="P9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0">void preorder(Node* node) {</text:p>
            <text:p text:style-name="P10"><text:s text:c="4"/>if (node == NULL) return; <text:s text:c="2"/>// 邊界條件</text:p>
            <text:p text:style-name="P10"><text:s text:c="4"/>visit(node); <text:s text:c="15"/>// ① 先拜訪自己（根）</text:p>
            <text:p text:style-name="P10"><text:s text:c="4"/>preorder(node-&gt;left); <text:s text:c="6"/>// ② 再遞迴左子樹</text:p>
            <text:p text:style-name="P10"><text:s text:c="4"/>preorder(node-&gt;right); <text:s text:c="5"/>// ③ 最後遞迴右子樹</text:p>
            <text:p text:style-name="P10">}</text:p>
            <text:p text:style-name="P1"/>
            <text:p text:style-name="P10">// Inorder：把 visit 移到 ② 和 ③ 之間</text:p>
            <text:p text:style-name="P10">// Postorder：把 visit 移到最後</text:p>
          </table:table-cell>
        </table:table-row>
      </table:table>
      <text:p text:style-name="Standard"/>
      <text:h text:style-name="P7" text:outline-level="1">第五章：唯一重建樹</text:h>
      <text:h text:style-name="P9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1">組合</text:p>
          </table:table-cell>
          <table:table-cell table:style-name="表格28.A1" office:value-type="string">
            <text:p text:style-name="P11">可唯一重建？</text:p>
          </table:table-cell>
          <table:table-cell table:style-name="表格28.A1" office:value-type="string">
            <text:p text:style-name="P11">原因</text:p>
          </table:table-cell>
        </table:table-row>
        <table:table-row table:style-name="表格28.1">
          <table:table-cell table:style-name="表格28.A2" office:value-type="string">
            <text:p text:style-name="P8">前序 + 中序</text:p>
          </table:table-cell>
          <table:table-cell table:style-name="表格28.B2" office:value-type="string">
            <text:p text:style-name="P158">✅ 可以</text:p>
          </table:table-cell>
          <table:table-cell table:style-name="表格28.C2" office:value-type="string">
            <text:p text:style-name="P8">中序可切出左右子樹</text:p>
          </table:table-cell>
        </table:table-row>
        <table:table-row table:style-name="表格28.1">
          <table:table-cell table:style-name="表格28.A3" office:value-type="string">
            <text:p text:style-name="P8">後序 + 中序</text:p>
          </table:table-cell>
          <table:table-cell table:style-name="表格28.B2" office:value-type="string">
            <text:p text:style-name="P158">✅ 可以</text:p>
          </table:table-cell>
          <table:table-cell table:style-name="表格28.C3" office:value-type="string">
            <text:p text:style-name="P8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8">前序 + 後序</text:p>
          </table:table-cell>
          <table:table-cell table:style-name="表格28.B4" office:value-type="string">
            <text:p text:style-name="P159">❌ 不唯一</text:p>
          </table:table-cell>
          <table:table-cell table:style-name="表格28.C4" office:value-type="string">
            <text:p text:style-name="P8">無法確定左右分界</text:p>
          </table:table-cell>
        </table:table-row>
      </table:table>
      <text:p text:style-name="P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4">⚠️ 前序 + 後序何時例外可唯一重建？</text:p>
            <text:p text:style-name="P14">→ 只有當樹中沒有 degree=1 的節點（即 Full Binary Tree）時，才能唯一重建。</text:p>
            <text:p text:style-name="P14">→ 若有 degree=1 的節點，則共有 2^k 種可能（k = degree-1 節點數）。</text:p>
            <text:p text:style-name="P14">→ 這就是圖片右欄「前+後=8種（deg-1節數）」的意思！</text:p>
          </table:table-cell>
        </table:table-row>
      </table:table>
      <text:p text:style-name="P1"/>
      <text:h text:style-name="P9" text:outline-level="2">5.2 前序 + 中序重建步驟（完整範例）</text:h>
      <text:p text:style-name="P8">已知：</text:p>
      <text:list text:style-name="WWNum3">
        <text:list-item text:start-value="1">
          <text:p text:style-name="P160">前序（Preorder）：A B C D E F G H I</text:p>
        </text:list-item>
        <text:list-item>
          <text:p text:style-name="P160">中序（Inorder）：B C A E D G H F I</text:p>
        </text:list-item>
      </text:list>
      <text:p text:style-name="P1"/>
      <text:p text:style-name="P8">步驟一：Preorder 第一個 = A = root</text:p>
      <text:p text:style-name="P8">步驟二：在 Inorder 找 A → 左邊 {B C} = 左子樹；右邊 {E D G H F I} = 右子樹</text:p>
      <text:p text:style-name="P8">步驟三：Preorder 中，A 後面2個（B C）對應左子樹 → 第一個 B = 左子樹 root</text:p>
      <text:p text:style-name="P8">步驟四：在 Inorder {B C} 找 B → 左邊 {} 空 → 右邊 {C}</text:p>
      <text:p text:style-name="P8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0">最終重建結果：</text:p>
            <text:p text:style-name="P10"><text:s text:c="12"/>A</text:p>
            <text:p text:style-name="P10"><text:s text:c="11"/>/ \</text:p>
            <text:p text:style-name="P10"><text:s text:c="10"/>B <text:s text:c="2"/>D</text:p>
            <text:p text:style-name="P10"><text:s text:c="11"/>\ <text:s/>/ \</text:p>
            <text:p text:style-name="P10"><text:s text:c="12"/>C E <text:s/>F</text:p>
            <text:p text:style-name="P10"><text:s text:c="14"/>/ / \</text:p>
            <text:p text:style-name="P10"><text:s text:c="13"/>G H <text:s text:c="2"/>I</text:p>
            <text:p text:style-name="P10">（注意：這是113高考Q1的典型題型）</text:p>
          </table:table-cell>
        </table:table-row>
      </table:table>
      <text:p text:style-name="Standard"/>
      <text:h text:style-name="P7" text:outline-level="1">第六章：Complete Binary Tree vs Full Binary Tree</text:h>
      <text:h text:style-name="P9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5">定義：</text:p>
            <text:p text:style-name="P5">1. 除了最後一層，其餘各層節點數都要全滿。</text:p>
            <text:p text:style-name="P5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15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5"/>/ \</text:p>
                  <text:p text:style-name="P10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5"/>/ \ /</text:p>
                  <text:p text:style-name="P10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16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9"/>/</text:p>
                  <text:p text:style-name="P10"><text:s text:c="8"/>D</text:p>
                </table:table-cell>
              </table:table-row>
            </table:table>
            <text:p text:style-name="P8">最後一層的 D 在右邊，左邊是空的 → 違反靠左規則</text:p>
          </table:table-cell>
        </table:table-row>
      </table:table>
      <text:p text:style-name="P1"/>
      <text:h text:style-name="P9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5">定義（圖片考試筆記原文）：除末層外全滿 2 層，末層靠左</text:p>
            <text:p text:style-name="P6"/>
            <text:p text:style-name="P5">前 h-1 層節點數（全滿）：2^(h-1) − 1</text:p>
            <text:p text:style-name="P5">末層至少 1 個：總節點數 ≥ 2^(h-1) − 1 + 1 = 2^(h-1)</text:p>
            <text:p text:style-name="P5">末層全滿時：總節點數 ≤ 2^(h-1) − 1 + 2^(h-1) = 2^h − 1</text:p>
            <text:p text:style-name="P6"/>
            <text:p text:style-name="P5">結論：2^(h-1) ≤ n ≤ 2^h − 1 <text:s/>（就是考試筆記中的公式！）</text:p>
          </table:table-cell>
        </table:table-row>
      </table:table>
      <text:p text:style-name="P1"/>
      <text:h text:style-name="P9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157">定義：每個節點的子節點數只能是 0 或 2，不能是 1。</text:p>
            <text:p text:style-name="P157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15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0"><text:s text:c="4"/>A</text:p>
                  <text:p text:style-name="P10"><text:s text:c="3"/>/ \</text:p>
                  <text:p text:style-name="P10"><text:s text:c="2"/>B <text:s text:c="2"/>C</text:p>
                  <text:p text:style-name="P10"><text:s text:c="5"/>/ \</text:p>
                  <text:p text:style-name="P10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16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0"><text:s text:c="4"/>A</text:p>
                  <text:p text:style-name="P10"><text:s text:c="3"/>/</text:p>
                  <text:p text:style-name="P10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"><text:soft-page-break/></text:p>
      <text:h text:style-name="P9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55">Complete Binary Tree</text:p>
            <text:p text:style-name="P8">限制「形狀」</text:p>
            <text:p text:style-name="P8">最後一層靠左</text:p>
            <text:p text:style-name="P8">Heap 一定是 CBT</text:p>
            <text:p text:style-name="P8">可以有 degree=1 的節點</text:p>
          </table:table-cell>
          <table:table-cell table:style-name="表格38.B1" office:value-type="string">
            <text:p text:style-name="P155">Full Binary Tree</text:p>
            <text:p text:style-name="P8">限制「每個節點的度數」</text:p>
            <text:p text:style-name="P8">每節點 0 或 2 個 child</text:p>
            <text:p text:style-name="P8">不一定是 CBT</text:p>
            <text:p text:style-name="P8">degree=1 的節點一個也沒有</text:p>
          </table:table-cell>
        </table:table-row>
      </table:table>
      <text:p text:style-name="Standard"/>
      <text:h text:style-name="P7" text:outline-level="1">第七章：Heap 與 Priority Queue</text:h>
      <text:h text:style-name="P9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1">Heap = 完全二元樹（Complete Binary Tree）+ 父子大小關係</text:p>
            <text:p text:style-name="P6"/>
            <text:p text:style-name="P161">Max Heap：每個父節點 ≥ 子節點（最大值永遠在 root）</text:p>
            <text:p text:style-name="P161">Min Heap：每個父節點 ≤ 子節點（最小值永遠在 root）</text:p>
          </table:table-cell>
        </table:table-row>
      </table:table>
      <text:p text:style-name="P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55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0"><text:s text:c="6"/>100</text:p>
                  <text:p text:style-name="P10"><text:s text:c="5"/>/ <text:s text:c="2"/>\</text:p>
                  <text:p text:style-name="P10"><text:s text:c="4"/>80 <text:s text:c="3"/>50</text:p>
                  <text:p text:style-name="P10"><text:s text:c="3"/>/ <text:s/>\</text:p>
                  <text:p text:style-name="P10"><text:s text:c="2"/>30 <text:s text:c="2"/>20</text:p>
                </table:table-cell>
              </table:table-row>
            </table:table>
            <text:p text:style-name="P8">100 ≥ 80 ≥ 50 ≥ 30 ≥ 20 <text:s/>✔</text:p>
          </table:table-cell>
          <table:table-cell table:style-name="表格42.B1" office:value-type="string">
            <text:p text:style-name="P155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0"><text:s text:c="7"/>10</text:p>
                  <text:p text:style-name="P10"><text:s text:c="6"/>/ <text:s/>\</text:p>
                  <text:p text:style-name="P10"><text:s text:c="4"/>20 <text:s text:c="3"/>15</text:p>
                  <text:p text:style-name="P10"><text:s text:c="3"/>/ <text:s/>\</text:p>
                  <text:p text:style-name="P10"><text:s text:c="2"/>30 <text:s text:c="2"/>25</text:p>
                </table:table-cell>
              </table:table-row>
            </table:table>
            <text:p text:style-name="P8">10 ≤ 20 ≤ 30 ≤ 25 <text:s/>✔</text:p>
          </table:table-cell>
        </table:table-row>
      </table:table>
      <text:p text:style-name="P1"/>
      <text:h text:style-name="P9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">Heap：只管「父 &gt; 子」（或父 &lt; 子），左右之間沒有大小關係</text:p>
            <text:p text:style-name="P14">BST：嚴格規定「左 &lt; 根 &lt; 右」</text:p>
            <text:p text:style-name="P6"/>
            <text:p text:style-name="P14">例： <text:s text:c="6"/>100 <text:s text:c="10"/>← Max Heap ✅（100&gt;80, 100&gt;50）</text:p>
            <text:p text:style-name="P14"><text:s text:c="10"/>/ <text:s text:c="2"/>\</text:p>
            <text:p text:style-name="P14"><text:s text:c="9"/>80 <text:s text:c="3"/>50 <text:s text:c="7"/>← Heap 合法，但 BST 不合法</text:p>
            <text:p text:style-name="P14"><text:s text:c="25"/>（BST 右邊要比 80 大，但 50 &lt; 80）</text:p>
          </table:table-cell>
        </table:table-row>
      </table:table>
      <text:p text:style-name="P1"/>
      <text:h text:style-name="P9" text:outline-level="2">7.3 Priority Queue（優先權佇列）</text:h>
      <text:p text:style-name="P8">現實比喻：急診室掛號——不是先來先看診，而是重傷優先。</text:p>
      <text:p text:style-name="P8">Heap 最適合實作 Priority Queue，因為：</text:p>
      <text:list text:continue-numbering="true" text:style-name="WWNum3">
        <text:list-item>
          <text:p text:style-name="P160">取出最大（或最小）值：只需取出 root → O(log n)</text:p>
        </text:list-item>
        <text:list-item>
          <text:p text:style-name="P160">插入新值：放在最後，向上浮（Sift Up）→ O(log n)</text:p>
        </text:list-item>
        <text:list-item>
          <text:p text:style-name="P160">Heap Sort 利用 Max Heap，可排序整個陣列 → O(n log n)</text:p>
        </text:list-item>
      </text:list>
      <text:p text:style-name="P1"/>
      <text:h text:style-name="P9" text:outline-level="2">7.4 Heap 的陣列表示</text:h>
      <text:p text:style-name="P8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">index: <text:s/>1 <text:s text:c="2"/>2 <text:s text:c="2"/>3 <text:s text:c="2"/>4 <text:s text:c="2"/>5 <text:s text:c="2"/>6 <text:s text:c="2"/>7</text:p>
            <text:p text:style-name="P10">value: 100 <text:s/>80 <text:s/>50 <text:s/>30 <text:s/>20 <text:s/>.. <text:s/>..</text:p>
            <text:p text:style-name="P1"/>
            <text:p text:style-name="P1"><text:soft-page-break/><text:span text:style-name="T9">規則：</text:span></text:p>
            <text:p text:style-name="P10"><text:s text:c="2"/>root <text:s text:c="7"/>= a[1]</text:p>
            <text:p text:style-name="P10"><text:s text:c="2"/>left child <text:s/>= a[2i]</text:p>
            <text:p text:style-name="P10"><text:s text:c="2"/>right child = a[2i+1]</text:p>
            <text:p text:style-name="P10"><text:s text:c="2"/>parent <text:s text:c="5"/>= a[⌊i/2⌋]</text:p>
          </table:table-cell>
        </table:table-row>
      </table:table>
      <text:p text:style-name="Standard"/>
      <text:h text:style-name="P7" text:outline-level="1">第八章：陣列表示法（Array Representation）</text:h>
      <text:h text:style-name="P9" text:outline-level="2">8.1 為什麼可以用陣列？</text:h>
      <text:p text:style-name="P8">完全二元樹的形狀非常規律，因此可以直接用一維陣列儲存，不需要指標（pointer）。</text:p>
      <text:h text:style-name="P9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">root <text:s text:c="7"/>= a[1]（注意：通常從 index=1 開始，不是 0）</text:p>
            <text:p text:style-name="P5">left child <text:s/>= a[2i]</text:p>
            <text:p text:style-name="P5">right child = a[2i+1]</text:p>
            <text:p text:style-name="P5">parent <text:s text:c="5"/>= a[⌊i/2⌋]（整數除法）</text:p>
          </table:table-cell>
        </table:table-row>
      </table:table>
      <text:p text:style-name="P1"/>
      <text:h text:style-name="P9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 text:c="10"/>a[1]=A</text:p>
            <text:p text:style-name="P10"><text:s text:c="9"/>/ <text:s text:c="5"/>\</text:p>
            <text:p text:style-name="P10"><text:s text:c="6"/>a[2]=B <text:s text:c="3"/>a[3]=C</text:p>
            <text:p text:style-name="P10"><text:s text:c="6"/>/ <text:s text:c="3"/>\ <text:s text:c="3"/>/ <text:s text:c="3"/>\</text:p>
            <text:p text:style-name="P10"><text:s text:c="2"/>a[4]=D a[5]=E a[6]=F a[7]=G</text:p>
            <text:p text:style-name="P1"/>
            <text:p text:style-name="P10">驗證：</text:p>
            <text:p text:style-name="P10"><text:s text:c="2"/>i=1（A）→ left=a[2]=B ✔, right=a[3]=C ✔</text:p>
            <text:p text:style-name="P10"><text:s text:c="2"/>i=2（B）→ left=a[4]=D ✔, right=a[5]=E ✔</text:p>
            <text:p text:style-name="P10"><text:s text:c="2"/>i=3（C）→ left=a[6]=F ✔, right=a[7]=G ✔</text:p>
            <text:p text:style-name="P10"><text:s text:c="2"/>i=4（D）→ parent=a[2]=B ✔</text:p>
            <text:p text:style-name="P10"><text:s text:c="2"/>i=5（E）→ parent=a[2]=B ✔（5/2=2 整數除法）</text:p>
            <text:p text:style-name="P10"><text:s text:c="2"/>i=6（F）→ parent=a[3]=C ✔</text:p>
            <text:p text:style-name="P10"><text:s text:c="2"/>i=1024 → parent=a[512] ✔（圖片原文：2×512=1024）</text:p>
          </table:table-cell>
        </table:table-row>
      </table:table>
      <text:p text:style-name="P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⚠️ 偏斜樹（Skewed Tree）的陣列浪費問題</text:p>
            <text:p text:style-name="P6"/>
            <text:p text:style-name="P14">偏斜樹高度 h 時只有 h 個節點，但陣列需要 2^h − 1 個空間。</text:p>
            <text:p text:style-name="P14">例：右偏斜樹 4 層（4 個節點）需要 2^4 − 1 = 15 個陣列空間，浪費了 11 格。</text:p>
            <text:p text:style-name="P14">→ 這就是「偏斜樹 = 最浪費」的原因（圖片考試筆記原文）。</text:p>
          </table:table-cell>
        </table:table-row>
      </table:table>
      <text:p text:style-name="Standard"/>
      <text:h text:style-name="P7" text:outline-level="1">第九章：歷屆考題詳解</text:h>
      <text:p text:style-name="P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62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163">題目：</text:p>
            <text:p text:style-name="P163"><text:s text:c="2"/>中序（Inorder）：F B A C E I H J G E（圖片原文：FBAC IH JGE）</text:p>
            <text:p text:style-name="P163"><text:s text:c="2"/>後序（Postorder）：原文最後一個為 E</text:p>
            <text:p text:style-name="P6"/>
            <text:p text:style-name="P163">解題步驟：</text:p>
            <text:p text:style-name="P163">1. 後序最後一個 = E = root</text:p>
            <text:p text:style-name="P163">2. 在中序找 E，E 左邊 = 左子樹，右邊 = 右子樹</text:p>
            <text:p text:style-name="P163">3. 繼續遞迴：後序第二最後 = 右子樹 root，以此類推</text:p>
            <text:p text:style-name="P6"/>
            <text:p text:style-name="P163">重點：後序 + 中序一定能唯一重建！</text:p>
          </table:table-cell>
        </table:table-row>
      </table:table>
      <text:p text:style-name="P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62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163">題目：前序=ABCD，後序=DCBA，問共有幾種可能的二元樹？</text:p>
            <text:p text:style-name="P6"/>
            <text:p text:style-name="P163">分析：</text:p>
            <text:p text:style-name="P163">• 前序第一個=A=root，後序最後一個=A ✔</text:p>
            <text:p text:style-name="P163">• 前序第二個=B → B可以是A的左child或右child（兩種）</text:p>
            <text:p text:style-name="P163">• 每個 internal node（A,B,C）各有「貼左或右」2個選擇</text:p>
            <text:p text:style-name="P163">• 共 3 個這樣的節點 → 2³ = 8 種</text:p>
            <text:p text:style-name="P6"/>
            <text:p text:style-name="P163">★ 圖片原文：「共8種可能（deg-1節可貼左子或右子）」</text:p>
          </table:table-cell>
        </table:table-row>
      </table:table>
      <text:p text:style-name="P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62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163">題目：證明 Complete Binary Tree 節點數 n 滿足 2^(h-1) ≤ n ≤ 2^h − 1</text:p>
            <text:p text:style-name="P6"/>
            <text:p text:style-name="P163">前 h-1 層全滿：節點數 = 2^(h-1) − 1</text:p>
            <text:p text:style-name="P163">下界：最後層至少 1 個 → n ≥ 2^(h-1) − 1 + 1 = 2^(h-1) <text:s/>✔</text:p>
            <text:p text:style-name="P163">上界：最後層全滿 → n ≤ 2^(h-1) − 1 + 2^(h-1) = 2^h − 1 <text:s/>✔</text:p>
            <text:p text:style-name="P163">→ 得證 2^(h-1) ≤ n ≤ 2^h − 1 <text:s/>(整理)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62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163">題目：用 1D 陣列存樹，root=a[1], left=a[2i], right=a[2i+1]</text:p>
            <text:p text:style-name="P163"><text:s text:c="6"/>引申：1024 的節點 parent=？ <text:s/>right=？</text:p>
            <text:p text:style-name="P6"/>
            <text:p text:style-name="P163">計算：</text:p>
            <text:p text:style-name="P163">• parent(1024) = ⌊1024/2⌋ = 512</text:p>
            <text:p text:style-name="P6"><text:soft-page-break/><text:span text:style-name="T68">• right(1024) <text:s/>= 2×1024+1 <text:s/>= 2049</text:span></text:p>
            <text:p text:style-name="P6"/>
            <text:p text:style-name="P163">★ 偏斜樹（Skewed Tree）：所有節點只有右 child（或只有左 child）</text:p>
            <text:p text:style-name="P163"><text:s text:c="3"/>→ 空間利用率最低，高度 h 只存 h 個節點，但陣列要 2^h−1 格</text:p>
          </table:table-cell>
        </table:table-row>
      </table:table>
      <text:p text:style-name="Standard"/>
      <text:h text:style-name="P7" text:outline-level="1">第十章：公職考試必考重點總整理</text:h>
      <text:h text:style-name="P9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1">公式</text:p>
          </table:table-cell>
          <table:table-cell table:style-name="表格52.A1" office:value-type="string">
            <text:p text:style-name="P11">數學式</text:p>
          </table:table-cell>
          <table:table-cell table:style-name="表格52.A1" office:value-type="string">
            <text:p text:style-name="P11">記憶口訣</text:p>
          </table:table-cell>
        </table:table-row>
        <table:table-row table:style-name="表格52.1">
          <table:table-cell table:style-name="表格52.A2" office:value-type="string">
            <text:p text:style-name="P8">分支數</text:p>
          </table:table-cell>
          <table:table-cell table:style-name="表格52.B2" office:value-type="string">
            <text:p text:style-name="P164">n − 1</text:p>
          </table:table-cell>
          <table:table-cell table:style-name="表格52.C2" office:value-type="string">
            <text:p text:style-name="P8">n個節點n-1條線</text:p>
          </table:table-cell>
        </table:table-row>
        <table:table-row table:style-name="表格52.1">
          <table:table-cell table:style-name="表格52.A3" office:value-type="string">
            <text:p text:style-name="P8">葉節點數</text:p>
          </table:table-cell>
          <table:table-cell table:style-name="表格52.B2" office:value-type="string">
            <text:p text:style-name="P164">n0 = n2 + 1</text:p>
          </table:table-cell>
          <table:table-cell table:style-name="表格52.C3" office:value-type="string">
            <text:p text:style-name="P8">葉比度2多一個</text:p>
          </table:table-cell>
        </table:table-row>
        <table:table-row table:style-name="表格52.1">
          <table:table-cell table:style-name="表格52.A4" office:value-type="string">
            <text:p text:style-name="P8">滿二元樹節點</text:p>
          </table:table-cell>
          <table:table-cell table:style-name="表格52.B2" office:value-type="string">
            <text:p text:style-name="P164">2^h − 1</text:p>
          </table:table-cell>
          <table:table-cell table:style-name="表格52.C4" office:value-type="string">
            <text:p text:style-name="P8">等比級數求和</text:p>
          </table:table-cell>
        </table:table-row>
        <table:table-row table:style-name="表格52.1">
          <table:table-cell table:style-name="表格52.A5" office:value-type="string">
            <text:p text:style-name="P8">CBT節點範圍</text:p>
          </table:table-cell>
          <table:table-cell table:style-name="表格52.B2" office:value-type="string">
            <text:p text:style-name="P164">2^(h−1) ≤ n ≤ 2^h−1</text:p>
          </table:table-cell>
          <table:table-cell table:style-name="表格52.C5" office:value-type="string">
            <text:p text:style-name="P8">夾住中間</text:p>
          </table:table-cell>
        </table:table-row>
        <table:table-row table:style-name="表格52.1">
          <table:table-cell table:style-name="表格52.A6" office:value-type="string">
            <text:p text:style-name="P8">陣列左子</text:p>
          </table:table-cell>
          <table:table-cell table:style-name="表格52.B2" office:value-type="string">
            <text:p text:style-name="P164">a[2i]</text:p>
          </table:table-cell>
          <table:table-cell table:style-name="表格52.C6" office:value-type="string">
            <text:p text:style-name="P8">乘2</text:p>
          </table:table-cell>
        </table:table-row>
        <table:table-row table:style-name="表格52.1">
          <table:table-cell table:style-name="表格52.A7" office:value-type="string">
            <text:p text:style-name="P8">陣列右子</text:p>
          </table:table-cell>
          <table:table-cell table:style-name="表格52.B2" office:value-type="string">
            <text:p text:style-name="P164">a[2i+1]</text:p>
          </table:table-cell>
          <table:table-cell table:style-name="表格52.C7" office:value-type="string">
            <text:p text:style-name="P8">乘2加1</text:p>
          </table:table-cell>
        </table:table-row>
        <table:table-row table:style-name="表格52.1">
          <table:table-cell table:style-name="表格52.A8" office:value-type="string">
            <text:p text:style-name="P8">陣列父節點</text:p>
          </table:table-cell>
          <table:table-cell table:style-name="表格52.B2" office:value-type="string">
            <text:p text:style-name="P164">a[⌊i/2⌋]</text:p>
          </table:table-cell>
          <table:table-cell table:style-name="表格52.C8" office:value-type="string">
            <text:p text:style-name="P8">除2取整</text:p>
          </table:table-cell>
        </table:table-row>
        <table:table-row table:style-name="表格52.1">
          <table:table-cell table:style-name="表格52.A9" office:value-type="string">
            <text:p text:style-name="P8">BST Inorder</text:p>
          </table:table-cell>
          <table:table-cell table:style-name="表格52.B2" office:value-type="string">
            <text:p text:style-name="P164">遞增排序</text:p>
          </table:table-cell>
          <table:table-cell table:style-name="表格52.C9" office:value-type="string">
            <text:p text:style-name="P8">中序有序</text:p>
          </table:table-cell>
        </table:table-row>
      </table:table>
      <text:p text:style-name="P1"/>
      <text:h text:style-name="P9" text:outline-level="2">10.2 考試題型速查</text:h>
      <text:list text:continue-numbering="true" text:style-name="WWNum3">
        <text:list-item>
          <text:p text:style-name="P165">Traversal（走訪）：給樹求前/中/後序 → 記住「根的位置」</text:p>
        </text:list-item>
        <text:list-item>
          <text:p text:style-name="P165">重建樹：給前序+中序 → 前序第一個是根，中序切左右</text:p>
        </text:list-item>
        <text:list-item>
          <text:p text:style-name="P165">前序+後序不唯一 → degree-1 節點每個有2種可能 → 2^k 種</text:p>
        </text:list-item>
        <text:list-item>
          <text:p text:style-name="P165">BST 插入刪除 → 刪除兩個子節點最難，找右子樹最小值補位</text:p>
        </text:list-item>
        <text:list-item>
          <text:p text:style-name="P165">Complete Binary Tree 判斷 → 最後一層要靠左</text:p>
        </text:list-item>
        <text:list-item>
          <text:p text:style-name="P165">陣列表示法 → parent=i/2, left=2i, right=2i+1</text:p>
        </text:list-item>
        <text:list-item>
          <text:p text:style-name="P165">Heap Sort → 建 Max Heap → 依序取出 root → O(n log n)</text:p>
        </text:list-item>
        <text:list-item>
          <text:p text:style-name="P165">偏斜樹 → 最浪費空間，等同 Linked List</text:p>
        </text:list-item>
      </text:list>
      <text:p text:style-name="P1"/>
      <text:h text:style-name="P9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7">✅ ChatGPT 的大部分說明都正確，以下補充被省略的細節：</text:p>
            <text:p text:style-name="P6"/>
            <text:p text:style-name="P37">1. n0 = n2 + 1 的公式推導 → ChatGPT 有說到 n0,n2 但沒有完整推導</text:p>
            <text:p text:style-name="P37">2. 前序+後序不唯一的精確說法：有 k 個 degree-1 節點 → 2^k 種可能</text:p>
            <text:p text:style-name="P37"><text:s text:c="3"/>（不是「通常不行」，是「有多少個 degree-1 就有多少倍的不確定性」）</text:p>
            <text:p text:style-name="P37">3. 偏斜樹（Skewed Tree）的概念 → ChatGPT 後期有提到但說明較少</text:p>
            <text:p text:style-name="P37">4. 114 Q1 的 8 種可能 → 來自 3 個 degree-1 節點各有 2 選擇（2^3=8）</text:p>
            <text:p text:style-name="P37">5. Complete Binary Tree 公式推導（115 Q2）→ 上下界各需分開說明</text:p>
            <text:p text:style-name="P37">6. 樹高定義有兩種（從 0 or 1 開始）→ 考試務必注意題目</text:p>
          </table:table-cell>
        </table:table-row>
      </table:table>
      <text:p text:style-name="Standard"/>
      <text:h text:style-name="P7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">◆ Binary Tree：每節點最多 2 個 child</text:p>
            <text:p text:style-name="P5">◆ 分支 = n−1 | 葉(n0) = 度2節點(n2) + 1</text:p>
            <text:p text:style-name="P5">◆ Preorder:根左右 | Inorder:左根右 | Postorder:左右根</text:p>
            <text:p text:style-name="P5">◆ BST Inorder = 遞增排序</text:p>
            <text:p text:style-name="P5">◆ 前序+中序 → 唯一重建 ✅ | 後序+中序 → 唯一重建 ✅</text:p>
            <text:p text:style-name="P5">◆ 前序+後序 → 不唯一（有 k 個 degree-1 節點 → 2^k 種）</text:p>
            <text:p text:style-name="P5">◆ Complete BT：最後層靠左 | Full BT：每節點 0 or 2 個 child</text:p>
            <text:p text:style-name="P5">◆ 2^(h−1) ≤ n ≤ 2^h−1（Complete BT 節點範圍）</text:p>
            <text:p text:style-name="P5">◆ Heap = CBT + 父子大小規則 | Max Heap root = 最大值</text:p>
            <text:p text:style-name="P5">◆ Heap ≠ BST（Heap 左右不保證大小順序）</text:p>
            <text:p text:style-name="P5">◆ 陣列：left=a[2i], right=a[2i+1], parent=a[⌊i/2⌋]</text:p>
            <text:p text:style-name="P5">◆ 偏斜樹 = 最浪費空間</text:p>
            <text:p text:style-name="P5">◆ BFS 用 Queue | DFS 用 Stack / 遞迴</text:p>
          </table:table-cell>
        </table:table-row>
      </table:table>
      <text:p text:style-name="P1"/>
      <text:p text:style-name="P1"/>
      <text:p text:style-name="P166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54</meta:editing-cycles>
    <meta:creation-date>2026-05-28T00:04:25.669000000</meta:creation-date>
    <dc:date>2026-06-22T22:34:47.533238600</dc:date>
    <meta:generator>LibreOffice/26.2.4.2$Windows_X86_64 LibreOffice_project/0229ac93fcf0d7cbc6376066c6f35021cef002dc</meta:generator>
    <meta:editing-duration>P1DT2H9M11S</meta:editing-duration>
    <meta:document-statistic meta:table-count="124" meta:image-count="0" meta:object-count="0" meta:page-count="35" meta:paragraph-count="1076" meta:word-count="11030" meta:character-count="21321" meta:non-whitespace-character-count="15291"/>
  </office:meta>
</office:document-meta>
</file>