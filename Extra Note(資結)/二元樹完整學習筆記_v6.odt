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3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4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38" style:family="paragraph" style:parent-style-name="Standard">
      <style:paragraph-properties fo:margin-top="0.088cm" fo:margin-bottom="0.088cm" style:contextual-spacing="false"/>
    </style:style>
    <style:style style:name="P3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4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5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56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5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9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1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62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63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64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65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66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6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6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9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83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8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8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90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91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9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94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95" style:family="paragraph" style:parent-style-name="Standard">
      <style:text-properties officeooo:paragraph-rsid="00529de2"/>
    </style:style>
    <style:style style:name="P96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97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98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99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1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5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6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09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10" style:family="paragraph" style:parent-style-name="Standard">
      <style:text-properties officeooo:paragraph-rsid="00549b67"/>
    </style:style>
    <style:style style:name="P111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12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13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14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15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16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Heading_20_2">
      <style:paragraph-properties fo:margin-top="0.423cm" fo:margin-bottom="0.212cm" style:contextual-spacing="false"/>
    </style:style>
    <style:style style:name="P118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1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20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2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2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2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2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2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2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27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28" style:family="paragraph" style:parent-style-name="Standard">
      <style:text-properties officeooo:paragraph-rsid="00d1b50e"/>
    </style:style>
    <style:style style:name="P129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0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31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3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33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3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36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7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8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9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4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4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4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14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46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14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150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15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153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4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5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76ff03" loext:char-shading-value="0"/>
    </style:style>
    <style:style style:name="T5" style:family="text">
      <style:text-properties fo:background-color="#18ffff" loext:char-shading-value="0"/>
    </style:style>
    <style:style style:name="T6" style:family="text">
      <style:text-properties fo:background-color="#18ffff" loext:char-shading-value="0"/>
    </style:style>
    <style:style style:name="T7" style:family="text">
      <style:text-properties fo:color="#ffd740" loext:opacity="100%"/>
    </style:style>
    <style:style style:name="T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1" style:family="text">
      <style:text-properties fo:color="#ffd740" loext:opacity="100%" fo:font-weight="bold" fo:background-color="#ffff00" loext:char-shading-value="0" style:font-weight-asian="bold" style:font-weight-complex="bold"/>
    </style:style>
    <style:style style:name="T12" style:family="text">
      <style:text-properties fo:color="#ffd740" loext:opacity="100%" fo:background-color="#000000" loext:char-shading-value="0"/>
    </style:style>
    <style:style style:name="T13" style:family="text">
      <style:text-properties fo:color="#ffd740" loext:opacity="100%" fo:background-color="#000000" loext:char-shading-value="0"/>
    </style:style>
    <style:style style:name="T14" style:family="text">
      <style:text-properties fo:color="#eeff41" loext:opacity="100%"/>
    </style:style>
    <style:style style:name="T15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6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7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8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9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21" style:family="text">
      <style:text-properties fo:color="#eeff41" loext:opacity="100%" fo:background-color="#f50057" loext:char-shading-value="0"/>
    </style:style>
    <style:style style:name="T22" style:family="text">
      <style:text-properties fo:color="#eeff41" loext:opacity="100%" fo:background-color="#f50057" loext:char-shading-value="0"/>
    </style:style>
    <style:style style:name="T23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24" style:family="text">
      <style:text-properties fo:color="#eeff41" loext:opacity="100%" style:font-name="Arial2" fo:font-weight="normal" fo:background-color="#f50057" loext:char-shading-value="0" style:font-name-asian="Arial2" style:font-weight-asian="normal" style:font-weight-complex="normal"/>
    </style:style>
    <style:style style:name="T25" style:family="text">
      <style:text-properties fo:color="#18ffff" loext:opacity="100%"/>
    </style:style>
    <style:style style:name="T26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3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31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32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33" style:family="text">
      <style:text-properties fo:color="#18ffff" loext:opacity="100%" fo:background-color="#d500f9" loext:char-shading-value="0"/>
    </style:style>
    <style:style style:name="T34" style:family="text">
      <style:text-properties fo:color="#18ffff" loext:opacity="100%" fo:background-color="#d500f9" loext:char-shading-value="0"/>
    </style:style>
    <style:style style:name="T35" style:family="text">
      <style:text-properties fo:color="#76ff03" loext:opacity="100%"/>
    </style:style>
    <style:style style:name="T3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7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8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39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40" style:family="text">
      <style:text-properties fo:color="#76ff03" loext:opacity="100%" fo:background-color="#5d4037" loext:char-shading-value="0"/>
    </style:style>
    <style:style style:name="T41" style:family="text">
      <style:text-properties fo:color="#76ff03" loext:opacity="100%" fo:background-color="#5d4037" loext:char-shading-value="0"/>
    </style:style>
    <style:style style:name="T42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43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5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d740" loext:char-shading-value="0"/>
    </style:style>
    <style:style style:name="T49" style:family="text">
      <style:text-properties fo:background-color="#ffd740" loext:char-shading-value="0"/>
    </style:style>
    <style:style style:name="T50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51" style:family="text">
      <style:text-properties fo:background-color="#d500f9" loext:char-shading-value="0"/>
    </style:style>
    <style:style style:name="T52" style:family="text">
      <style:text-properties fo:font-weight="bold" fo:background-color="#eeff41" loext:char-shading-value="0" style:font-weight-asian="bold" style:font-weight-complex="bold"/>
    </style:style>
    <style:style style:name="T53" style:family="text">
      <style:text-properties fo:font-weight="bold" fo:background-color="#ffff00" loext:char-shading-value="0" style:font-weight-asian="bold" style:font-weight-complex="bold"/>
    </style:style>
    <style:style style:name="T54" style:family="text">
      <style:text-properties fo:font-weight="bold" fo:background-color="#ffff00" loext:char-shading-value="0" style:font-weight-asian="bold" style:font-weight-complex="bold"/>
    </style:style>
    <style:style style:name="T55" style:family="text">
      <style:text-properties fo:font-weight="bold" fo:background-color="#ffd740" loext:char-shading-value="0" style:font-weight-asian="bold" style:font-weight-complex="bold"/>
    </style:style>
    <style:style style:name="T56" style:family="text">
      <style:text-properties fo:font-weight="bold" fo:background-color="#ffd740" loext:char-shading-value="0" style:font-weight-asian="bold" style:font-weight-complex="bold"/>
    </style:style>
    <style:style style:name="T57" style:family="text">
      <style:text-properties fo:font-weight="bold" fo:background-color="#18ffff" loext:char-shading-value="0" style:font-weight-asian="bold" style:font-weight-complex="bold"/>
    </style:style>
    <style:style style:name="T58" style:family="text">
      <style:text-properties fo:font-weight="bold" fo:background-color="#18ffff" loext:char-shading-value="0" style:font-weight-asian="bold" style:font-weight-complex="bold"/>
    </style:style>
    <style:style style:name="T59" style:family="text">
      <style:text-properties fo:font-weight="bold" fo:background-color="#00e676" loext:char-shading-value="0" style:font-weight-asian="bold" style:font-weight-complex="bold"/>
    </style:style>
    <style:style style:name="T60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66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67" style:family="text">
      <style:text-properties fo:background-color="#eeff41" loext:char-shading-value="0"/>
    </style:style>
    <style:style style:name="T68" style:family="text">
      <style:text-properties fo:background-color="#eeff41" loext:char-shading-value="0"/>
    </style:style>
    <style:style style:name="T69" style:family="text">
      <style:text-properties fo:background-color="#ffc400" loext:char-shading-value="0"/>
    </style:style>
    <style:style style:name="T70" style:family="text">
      <style:text-properties fo:background-color="#64ffda" loext:char-shading-value="0"/>
    </style:style>
    <style:style style:name="T71" style:family="text">
      <style:text-properties fo:background-color="#64ffda" loext:char-shading-value="0"/>
    </style:style>
    <style:style style:name="T72" style:family="text">
      <style:text-properties fo:background-color="#ff4081" loext:char-shading-value="0"/>
    </style:style>
    <style:style style:name="T73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74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7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7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78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79" style:family="text">
      <style:text-properties fo:color="#ff3d00" loext:opacity="100%" fo:background-color="#64ffda" loext:char-shading-value="0"/>
    </style:style>
    <style:style style:name="T80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81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82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83" style:family="text">
      <style:text-properties fo:background-color="#ff5252" loext:char-shading-value="0"/>
    </style:style>
    <style:style style:name="T84" style:family="text">
      <style:text-properties officeooo:rsid="00dcd50c" fo:background-color="#ff5252" loext:char-shading-value="0"/>
    </style:style>
    <style:style style:name="T85" style:family="text">
      <style:text-properties fo:background-color="#f50057" loext:char-shading-value="0"/>
    </style:style>
    <style:style style:name="T86" style:family="text">
      <style:text-properties fo:background-color="#f50057" loext:char-shading-value="0"/>
    </style:style>
    <style:style style:name="T87" style:family="text">
      <style:text-properties fo:color="#f50057" loext:opacity="100%" fo:background-color="#ffff00" loext:char-shading-value="0"/>
    </style:style>
    <style:style style:name="T88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89" style:family="text">
      <style:text-properties fo:background-color="#1de9b6" loext:char-shading-value="0"/>
    </style:style>
    <style:style style:name="T90" style:family="text">
      <style:text-properties fo:background-color="transparent" loext:char-shading-value="0"/>
    </style:style>
    <style:style style:name="T91" style:family="text">
      <style:text-properties fo:background-color="#00e676" loext:char-shading-value="0"/>
    </style:style>
    <style:style style:name="T92" style:family="text">
      <style:text-properties fo:background-color="#00e67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3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38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4">在學任何公式之前，先把樹的形狀刻進腦子裡。</text:p>
      <text:h text:style-name="P3" text:outline-level="2">1.1 現實生活比喻</text:h>
      <text:p text:style-name="P34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4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5">最頂端的節點，只有一個</text:p>
            <text:p text:style-name="P35">往下連接的節點</text:p>
            <text:p text:style-name="P35">往上連接的節點</text:p>
            <text:p text:style-name="P35">degree = 0，沒有 child 的節點</text:p>
            <text:p text:style-name="P35"><text:span text:style-name="T3">一個節點有幾個 child</text:span>（<text:span text:style-name="T5">二元樹最多 = 2</text:span>）</text:p>
            <text:p text:style-name="P35">連接兩個節點的線；n 個節點 ⇒ n−1 條邊</text:p>
            <text:p text:style-name="P35">degree ≥ 1，還有子節點</text:p>
            <text:p text:style-name="P35">以任意節點為 root 往下看，本身也是一棵樹</text:p>
            <text:p text:style-name="P35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9">⚠️ 重要：樹沒有環（Cycle）！</text:p>
            <text:p text:style-name="P39">若節點 A → B → C → A（繞回去），那就不叫樹，叫圖（Graph）。</text:p>
            <text:p text:style-name="P39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4"><text:span text:style-name="T8">每個節點最多只能有「兩個」子節點</text:span>：<text:span text:style-name="T15">左子節點（left child）</text:span>和<text:span text:style-name="T26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46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5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36"> n 個節點</text:span>的二元樹，共有 <text:span text:style-name="T26">n−1 條邊</text:span></text:p>
            <text:p text:style-name="P38"/>
            <text:p text:style-name="P13">公式2：葉節點（n0） = 度數為2的節點（n2） + 1</text:p>
            <text:p text:style-name="P13"><text:s text:c="2"/>→ n0 = n2 + 1 <text:s text:c="2"/>← 圖片原始考試筆記中隱含的超重要公式！</text:p>
            <text:p text:style-name="P38"/>
            <text:p text:style-name="P13">公式3：Full Binary Tree（滿二元樹）最大節點數 = 2^h − 1</text:p>
            <text:p text:style-name="P13"><text:s text:c="2"/>→ 高度 h 時，每層全滿</text:p>
            <text:p text:style-name="P38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64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65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64"/>
      <text:p text:style-name="P67">第一步：先把 degree（度數）看懂</text:p>
      <text:p text:style-name="P77"><text:span text:style-name="T27">degree = 一個節點有幾個小孩（child）</text:span>。二元樹最多 2 個。</text:p>
      <text:p text:style-name="P77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66"><text:soft-page-break/><text:span text:style-name="T42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64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88">定義</text:p>
          </table:table-cell>
          <table:table-cell table:style-name="表格57.B1" office:value-type="string">
            <text:p text:style-name="P78"><text:span text:style-name="T43">n₀ <text:s/>= degree 為 0 的節點數</text:span> <text:s/>→ 葉節點（Leaf）</text:p>
            <text:p text:style-name="P78"><text:span text:style-name="T36">n₁ <text:s/>= degree 為 1 的節點數</text:span> <text:s/>→ 只有一個小孩的節點</text:p>
            <text:p text:style-name="P78"><text:span text:style-name="T26">n₂ <text:s/>= degree 為 2 的節點數</text:span> <text:s/>→ 有兩個小孩的節點</text:p>
          </table:table-cell>
        </table:table-row>
      </table:table>
      <text:p text:style-name="P64"/>
      <text:p text:style-name="P77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46">C 和 D 是葉子</text:span>）</text:p>
            <text:p text:style-name="P27"><text:s text:c="2"/>n₁ = 1 <text:s/>（<text:span text:style-name="T46">B 只有一個小孩</text:span>）</text:p>
            <text:p text:style-name="P27"><text:s text:c="2"/>n₂ = 1 <text:s/>（<text:span text:style-name="T46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64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88">步驟 1</text:p>
          </table:table-cell>
          <table:table-cell table:style-name="表格59.B1" office:value-type="string">
            <text:p text:style-name="P78"><text:span text:style-name="T27">總節點數 = 三種度數節點加起來</text:span>：</text:p>
            <text:p text:style-name="P78">n <text:s/>= <text:s/>n₀ + n₁ + n₂</text:p>
          </table:table-cell>
        </table:table-row>
      </table:table>
      <text:p text:style-name="P64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88">步驟 2</text:p>
          </table:table-cell>
          <table:table-cell table:style-name="表格60.B1" office:value-type="string">
            <text:p text:style-name="P78">從「節點個數」看邊數：</text:p>
            <text:p text:style-name="P65"/>
            <text:p text:style-name="P78">樹有一個性質：<text:span text:style-name="T16">n 個節點，一定有 n−1 條邊</text:span>。</text:p>
            <text:p text:style-name="P78">（因為<text:span text:style-name="T36">每條邊都連著一個被連過來的節點</text:span>，<text:span text:style-name="T29">除了 root 每個人都有一條邊連著自己</text:span>）</text:p>
            <text:p text:style-name="P65"/>
            <text:p text:style-name="P80"><text:s text:c="2"/>▶ <text:span text:style-name="T48">邊數 <text:s/>= <text:s/>n(</text:span><text:span text:style-name="T50">n 個節點</text:span><text:span text:style-name="T48">) − 1 </text:span><text:s text:c="8"/>← 第一個邊數公式</text:p>
          </table:table-cell>
        </table:table-row>
      </table:table>
      <text:p text:style-name="P64"/>
      <text:p text:style-name="P77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64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88">步驟 3</text:p>
          </table:table-cell>
          <table:table-cell table:style-name="表格62.B1" office:value-type="string">
            <text:p text:style-name="P78">從「<text:span text:style-name="T8">每個節點往下伸出幾條線</text:span>」<text:span text:style-name="T17">看邊數</text:span>：</text:p>
            <text:p text:style-name="P65"/>
            <text:p text:style-name="P78">換個角度——<text:span text:style-name="T44">每個節點都可以向下「貢獻」它的子邊</text:span>：</text:p>
            <text:p text:style-name="P78"><text:s text:c="2"/>• degree = 0 的節點（葉子） <text:s text:c="2"/>→ 貢獻 <text:s/>0 <text:s/>條邊</text:p>
            <text:p text:style-name="P78"><text:s text:c="2"/>• degree = 1 的節點 <text:s text:c="10"/>→ 貢獻 <text:s/>1 <text:s/>條邊</text:p>
            <text:p text:style-name="P78"><text:s text:c="2"/>• degree = 2 的節點 <text:s text:c="10"/>→ 貢獻 <text:s/>2 <text:s/>條邊</text:p>
            <text:p text:style-name="P65"/>
            <text:p text:style-name="P78"><text:span text:style-name="T27">把全部節點的貢獻加起來，就是樹的總邊數</text:span>：</text:p>
            <text:p text:style-name="P65"><text:soft-page-break/></text:p>
            <text:p text:style-name="P78"><text:s text:c="2"/>▶ <text:span text:style-name="T16">邊數</text:span> <text:s/>= <text:s/><text:span text:style-name="T16">0</text:span>×n₀ <text:s/>+ <text:s/><text:span text:style-name="T16">1</text:span>×n₁ <text:s/>+ <text:s/><text:span text:style-name="T16">2</text:span>×n₂ <text:s text:c="2"/>← 第二個邊數公式</text:p>
          </table:table-cell>
        </table:table-row>
      </table:table>
      <text:p text:style-name="P64"/>
      <text:p text:style-name="P77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66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66"/>
            <text:p text:style-name="P27"><text:s text:c="2"/>C、D 沒有小孩 <text:s/>→ <text:s/>各貢獻 0 條邊</text:p>
            <text:p text:style-name="P66"/>
            <text:p text:style-name="P27"><text:s text:c="2"/>全部加起來：2 + 1 + 0 + 0 = 3 條邊 <text:s/>= <text:s/>n−1 = 4−1 = 3 <text:s/>✔</text:p>
          </table:table-cell>
        </table:table-row>
      </table:table>
      <text:p text:style-name="P64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88">步驟 4</text:p>
          </table:table-cell>
          <table:table-cell table:style-name="表格64.B1" office:value-type="string">
            <text:p text:style-name="P78">兩個邊數公式算的是同一件事，所以畫等號：</text:p>
            <text:p text:style-name="P89"/>
            <text:p text:style-name="P78"><text:s/><text:span text:style-name="T51"><text:s/></text:span><text:span text:style-name="T27">n − 1 <text:s/>= <text:s/>0×n₀ <text:s/>+ <text:s/>1×n₁ <text:s/>+ <text:s/>2×n₂</text:span></text:p>
            <text:p text:style-name="P65"/>
            <text:p text:style-name="P78">把 n = n₀ + n₁ + n₂ 代入左邊：</text:p>
            <text:p text:style-name="P65"/>
            <text:p text:style-name="P78"><text:s text:c="2"/>n₀ + n₁ + n₂ − 1 <text:s/>= <text:s/>n₁ + 2n₂</text:p>
          </table:table-cell>
        </table:table-row>
      </table:table>
      <text:p text:style-name="P64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88">步驟 5</text:p>
          </table:table-cell>
          <table:table-cell table:style-name="表格65.B1" office:value-type="string">
            <text:p text:style-name="P78">整理數學式（兩邊同時消去 n₁）：</text:p>
            <text:p text:style-name="P65"/>
            <text:p text:style-name="P78"><text:s text:c="2"/>n₀ + n₁ + n₂ − 1 <text:s/>= <text:s/>n₁ + 2n₂</text:p>
            <text:p text:style-name="P78"><text:s text:c="2"/>↓ <text:s/>兩邊減去 n₁</text:p>
            <text:p text:style-name="P78"><text:s text:c="2"/>n₀ + n₂ − 1 <text:s/>= <text:s/>2n₂</text:p>
            <text:p text:style-name="P78"><text:s text:c="2"/>↓ <text:s/>移項</text:p>
            <text:p text:style-name="P78"><text:s text:c="2"/>n₀ <text:s/>= <text:s/>2n₂ − n₂ + 1 <text:s/>= <text:s/>n₂ + 1</text:p>
            <text:p text:style-name="P65"/>
            <text:p text:style-name="P78"><text:s text:c="2"/>▶ <text:s/>n₀ = n₂ + 1 <text:s text:c="3"/>✔ 得證！</text:p>
          </table:table-cell>
        </table:table-row>
      </table:table>
      <text:p text:style-name="P64"/>
      <text:p text:style-name="P67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79"><text:span text:style-name="T52">n₀ = 葉節點數</text:span>；<text:span text:style-name="T53">n₁ = degree-1 節點數</text:span>；<text:span text:style-name="T55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90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79"><text:span text:style-name="T31">邊數 = n − 1</text:span>（<text:span text:style-name="T26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79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79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79">消去 n₁ 後移項：<text:span text:style-name="T27">n₀ = n₂ + 1</text:span> <text:s/>✔</text:p>
          </table:table-cell>
        </table:table-row>
      </table:table>
      <text:p text:style-name="P64"/>
      <text:p text:style-name="P67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1">題型：某二元樹<text:span text:style-name="T46">有 20 個 degree=2 的節點</text:span>，請問<text:span text:style-name="T48">有幾個葉節點</text:span>？</text:p>
            <text:p text:style-name="P65"/>
            <text:p text:style-name="P51"><text:s text:c="2"/>直接套公式：n₀ = n₂ + 1 = 20 + 1 = 21 個</text:p>
            <text:p text:style-name="P65"/>
            <text:p text:style-name="P51">反過來也可以：若已知葉節點 15 個，則 degree=2 的節點有 15 − 1 = 14 個</text:p>
          </table:table-cell>
        </table:table-row>
      </table:table>
      <text:p text:style-name="P64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0">⚠️ <text:span text:style-name="T17">此公式僅適用於 Binary Tree（二元樹）！</text:span></text:p>
            <text:p text:style-name="P65"/>
            <text:p text:style-name="P40">因為二元樹的 degree 最多為 2，只有 n₀、n₁、n₂ 三種情況。</text:p>
            <text:p text:style-name="P40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33">2^h − 1</text:span>）</text:h>
      <text:p text:style-name="P34"><text:span text:style-name="T36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27">2^h − 1 </text:span><text:span text:style-name="T19">(Full Binary Tree（滿二元樹）</text:span><text:span text:style-name="T60">最大節點數 = 2^h − 1</text:span><text:span text:style-name="T19"> → </text:span><text:span text:style-name="T61">高度 h 時，每層全滿</text:span><text:span text:style-name="T19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9">⚠️ 高度定義有兩種，考試務必看清楚題目！</text:p>
            <text:p text:style-name="P38"/>
            <text:p text:style-name="P39"><text:span text:style-name="T53">定義一：root 算第 1 層</text:span> → 只有 root 的樹，高度 = 1</text:p>
            <text:p text:style-name="P39"><text:span text:style-name="T53">定義二：root 算第 0 層</text:span> → 只有 root 的樹，高度 = 0</text:p>
            <text:p text:style-name="P38"/>
            <text:p text:style-name="P39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5">左子樹的所有值 &lt; 根節點值 &lt; 右子樹的所有值</text:p>
            <text:p text:style-name="P52">（<text:span text:style-name="T27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4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68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68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68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62">找右子樹最小值（60）來取代 50</text:span></text:p>
            <text:p text:style-name="P26">方法二：<text:span text:style-name="T63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42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81"><text:span text:style-name="T17">BST 搜尋快的前提是「每次比較都能砍掉一半」</text:span>，<text:span text:style-name="T27">但這個前提要求樹夠平均</text:span>。若<text:span text:style-name="T36">插入順序不佳，樹會退化成直線</text:span>。</text:p>
      <text:p text:style-name="P93"/>
      <text:p text:style-name="P69">退化的三種情況</text:p>
      <text:p text:style-name="P45">① 遞增插入 → 右偏斜樹</text:p>
      <text:p text:style-name="P81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46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93"/>
      <text:p text:style-name="P45">② 遞減插入 → 左偏斜樹</text:p>
      <text:p text:style-name="P81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93"/>
      <text:p text:style-name="P45">③ 鋸齒插入 → 看起來平衡，其實歪了</text:p>
      <text:p text:style-name="P81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94"><text:soft-page-break/><text:span text:style-name="T42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93"/>
      <text:p text:style-name="P69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46">正常</text:span> BST（平衡）</text:p>
          </table:table-cell>
          <table:table-cell table:style-name="表格69.A1" office:value-type="string">
            <text:p text:style-name="P19"><text:span text:style-name="T48">退化</text:span> BST</text:p>
          </table:table-cell>
        </table:table-row>
        <table:table-row table:style-name="表格69.1">
          <table:table-cell table:style-name="表格69.A2" office:value-type="string">
            <text:p text:style-name="P81">搜尋</text:p>
          </table:table-cell>
          <table:table-cell table:style-name="表格69.B2" office:value-type="string">
            <text:p text:style-name="P56">O(<text:span text:style-name="T46">log n</text:span>)</text:p>
          </table:table-cell>
          <table:table-cell table:style-name="表格69.C2" office:value-type="string">
            <text:p text:style-name="P63">O(n)</text:p>
          </table:table-cell>
        </table:table-row>
        <table:table-row table:style-name="表格69.1">
          <table:table-cell table:style-name="表格69.A3" office:value-type="string">
            <text:p text:style-name="P81">插入</text:p>
          </table:table-cell>
          <table:table-cell table:style-name="表格69.B2" office:value-type="string">
            <text:p text:style-name="P56">O(<text:span text:style-name="T46">log n</text:span>)</text:p>
          </table:table-cell>
          <table:table-cell table:style-name="表格69.C2" office:value-type="string">
            <text:p text:style-name="P63">O(n)</text:p>
          </table:table-cell>
        </table:table-row>
        <table:table-row table:style-name="表格69.1">
          <table:table-cell table:style-name="表格69.A4" office:value-type="string">
            <text:p text:style-name="P81">刪除</text:p>
          </table:table-cell>
          <table:table-cell table:style-name="表格69.B2" office:value-type="string">
            <text:p text:style-name="P56">O(<text:span text:style-name="T46">log n</text:span>)</text:p>
          </table:table-cell>
          <table:table-cell table:style-name="表格69.C2" office:value-type="string">
            <text:p text:style-name="P63">O(n)</text:p>
          </table:table-cell>
        </table:table-row>
      </table:table>
      <text:p text:style-name="P93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27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93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1"><text:span text:style-name="T53">偏斜樹</text:span> = <text:span text:style-name="T17">所有節點只有左子節點，或只有右子節點</text:span></text:p>
            <text:p text:style-name="P41">→ <text:span text:style-name="T36">形狀等同 Linked List</text:span></text:p>
            <text:p text:style-name="P41">→ 高度 h 時只有 h 個節點（最少）</text:p>
          </table:table-cell>
        </table:table-row>
      </table:table>
      <text:p text:style-name="P93"/>
      <text:p text:style-name="P81">如果<text:span text:style-name="T65">用陣列儲存</text:span><text:span text:style-name="T57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52">2×1+1</text:span> = 3）</text:p>
            <text:p text:style-name="P29">節點3 在 index=7 <text:s/>（3 的右子 = <text:span text:style-name="T52">2×3+1</text:span> = 7）</text:p>
            <text:p text:style-name="P29">節點4 在 index=15 （7 的右子 = <text:span text:style-name="T52">2×7+1</text:span> = 15）</text:p>
            <text:p text:style-name="P29">節點5 在 index=31 （15的右子 = <text:span text:style-name="T52">2×15+1</text:span> = 31）</text:p>
            <text:p text:style-name="P94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94"/>
            <text:p text:style-name="P29"><text:span text:style-name="T64">5 個節點，卻佔用 2^5 - 1 = 31 格</text:span>，<text:span text:style-name="T44">浪費 26 格！</text:span></text:p>
          </table:table-cell>
        </table:table-row>
      </table:table>
      <text:p text:style-name="P93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81">3</text:p>
          </table:table-cell>
          <table:table-cell table:style-name="表格73.B2" office:value-type="string">
            <text:p text:style-name="P81">7</text:p>
          </table:table-cell>
          <table:table-cell table:style-name="表格73.C2" office:value-type="string">
            <text:p text:style-name="P61">4</text:p>
          </table:table-cell>
          <table:table-cell table:style-name="表格73.C2" office:value-type="string">
            <text:p text:style-name="P62">43%</text:p>
          </table:table-cell>
        </table:table-row>
        <table:table-row table:style-name="表格73.1">
          <table:table-cell table:style-name="表格73.A3" office:value-type="string">
            <text:p text:style-name="P81">5</text:p>
          </table:table-cell>
          <table:table-cell table:style-name="表格73.B3" office:value-type="string">
            <text:p text:style-name="P81">31</text:p>
          </table:table-cell>
          <table:table-cell table:style-name="表格73.C2" office:value-type="string">
            <text:p text:style-name="P61">26</text:p>
          </table:table-cell>
          <table:table-cell table:style-name="表格73.C2" office:value-type="string">
            <text:p text:style-name="P62">16%</text:p>
          </table:table-cell>
        </table:table-row>
        <table:table-row table:style-name="表格73.1">
          <table:table-cell table:style-name="表格73.A4" office:value-type="string">
            <text:p text:style-name="P81">10</text:p>
          </table:table-cell>
          <table:table-cell table:style-name="表格73.B4" office:value-type="string">
            <text:p text:style-name="P81">1,023</text:p>
          </table:table-cell>
          <table:table-cell table:style-name="表格73.C2" office:value-type="string">
            <text:p text:style-name="P61">1,013</text:p>
          </table:table-cell>
          <table:table-cell table:style-name="表格73.C2" office:value-type="string">
            <text:p text:style-name="P62">&lt; 1%</text:p>
          </table:table-cell>
        </table:table-row>
      </table:table>
      <text:p text:style-name="P93"/>
      <text:h text:style-name="P5" text:outline-level="2">3.6　<text:span text:style-name="T48">解決方法：平衡樹</text:span></text:h>
      <text:p text:style-name="P81"><text:span text:style-name="T27">只要讓樹「自動保持平衡」</text:span>，<text:span text:style-name="T17">就能確保搜尋永遠是 O(log n)</text:span>。</text:p>
      <text:p text:style-name="P93"/>
      <text:p text:style-name="P69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2">強制規定：任何節點的左右子樹高度差 ≤ 1</text:p>
            <text:p text:style-name="P72">違反時立即「旋轉」調整</text:p>
          </table:table-cell>
        </table:table-row>
      </table:table>
      <text:p text:style-name="P81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8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95"/>
          </table:table-cell>
          <table:table-cell table:style-name="表格75.B1" office:value-type="string">
            <text:p text:style-name="P47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95"/>
          </table:table-cell>
        </table:table-row>
      </table:table>
      <text:p text:style-name="P93"/>
      <text:p text:style-name="P81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LL 旋轉</text:p>
          </table:table-cell>
          <table:table-cell table:style-name="表格78.B2" office:value-type="string">
            <text:p text:style-name="P81">新節點在左子樹的左邊</text:p>
          </table:table-cell>
          <table:table-cell table:style-name="表格78.C2" office:value-type="string">
            <text:p text:style-name="P81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RR 旋轉</text:p>
          </table:table-cell>
          <table:table-cell table:style-name="表格78.B3" office:value-type="string">
            <text:p text:style-name="P81">新節點在右子樹的右邊</text:p>
          </table:table-cell>
          <table:table-cell table:style-name="表格78.C3" office:value-type="string">
            <text:p text:style-name="P81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LR 旋轉</text:p>
          </table:table-cell>
          <table:table-cell table:style-name="表格78.B4" office:value-type="string">
            <text:p text:style-name="P81">新節點在左子樹的右邊</text:p>
          </table:table-cell>
          <table:table-cell table:style-name="表格78.C4" office:value-type="string">
            <text:p text:style-name="P81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RL 旋轉</text:p>
          </table:table-cell>
          <table:table-cell table:style-name="表格78.B5" office:value-type="string">
            <text:p text:style-name="P81">新節點在右子樹的左邊</text:p>
          </table:table-cell>
          <table:table-cell table:style-name="表格78.C5" office:value-type="string">
            <text:p text:style-name="P81">先右旋再左旋（兩次）</text:p>
          </table:table-cell>
        </table:table-row>
      </table:table>
      <text:p text:style-name="P93"/>
      <text:p text:style-name="P69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9">規則比 AVL Tree 寬鬆，不要求嚴格平衡，旋轉次數更少</text:p>
            <text:p text:style-name="P99">平均效能比 AVL Tree 更穩定，適合頻繁插入刪除的場景</text:p>
            <text:p text:style-name="P96"/>
            <text:p text:style-name="P99">實際應用：</text:p>
            <text:p text:style-name="P99"><text:s text:c="2"/>✔ C++ STL 的 std::map、std::set</text:p>
            <text:p text:style-name="P99"><text:s text:c="2"/>✔ Java 的 TreeMap、TreeSet</text:p>
            <text:p text:style-name="P99"><text:s text:c="2"/>✔ Linux 核心的行程排程器</text:p>
          </table:table-cell>
        </table:table-row>
      </table:table>
      <text:p text:style-name="P93"><text:soft-page-break/></text:p>
      <text:p text:style-name="P69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2">每個節點可以有很多 key（不只 2 個）</text:p>
            <text:p text:style-name="P72">專為磁碟讀取最佳化：一次讀一個節點 = 一次磁碟 I/O</text:p>
            <text:p text:style-name="P96"/>
            <text:p text:style-name="P72">實際應用：</text:p>
            <text:p text:style-name="P72"><text:s text:c="2"/>✔ MySQL、PostgreSQL 的索引（Index）</text:p>
            <text:p text:style-name="P72"><text:s text:c="2"/>✔ 檔案系統（NTFS、ext4）</text:p>
          </table:table-cell>
        </table:table-row>
      </table:table>
      <text:p text:style-name="P93"/>
      <text:p text:style-name="P69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97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81">最嚴格</text:p>
          </table:table-cell>
          <table:table-cell table:style-name="表格81.C2" office:value-type="string">
            <text:p text:style-name="P81">較寬鬆</text:p>
          </table:table-cell>
          <table:table-cell table:style-name="表格81.D2" office:value-type="string">
            <text:p text:style-name="P81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81">最快</text:p>
          </table:table-cell>
          <table:table-cell table:style-name="表格81.C3" office:value-type="string">
            <text:p text:style-name="P81">略慢</text:p>
          </table:table-cell>
          <table:table-cell table:style-name="表格81.D3" office:value-type="string">
            <text:p text:style-name="P81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81">較慢（旋轉多）</text:p>
          </table:table-cell>
          <table:table-cell table:style-name="表格81.C4" office:value-type="string">
            <text:p text:style-name="P81">較快</text:p>
          </table:table-cell>
          <table:table-cell table:style-name="表格81.D4" office:value-type="string">
            <text:p text:style-name="P81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81">記憶體搜尋</text:p>
          </table:table-cell>
          <table:table-cell table:style-name="表格81.C5" office:value-type="string">
            <text:p text:style-name="P81">STL / Java</text:p>
          </table:table-cell>
          <table:table-cell table:style-name="表格81.D5" office:value-type="string">
            <text:p text:style-name="P81">資料庫索引</text:p>
          </table:table-cell>
        </table:table-row>
      </table:table>
      <text:p text:style-name="P93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3">🎯 一句話記住核心：</text:p>
            <text:p text:style-name="P53">BST 不保證平衡，插入順序決定形狀；</text:p>
            <text:p text:style-name="P53">要保證 O(log n) 就必須用 AVL Tree 或 Red-Black Tree。</text:p>
          </table:table-cell>
        </table:table-row>
      </table:table>
      <text:p text:style-name="P98"/>
      <text:p text:style-name="P98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2">先搞清楚：AVL Tree 和 Red-Black Tree 是二元樹（每節點最多 2 個小孩）</text:p>
            <text:p text:style-name="P42">但 B-Tree 不是二元樹！每個節點可以有很多小孩，是「多元樹（M-ary Tree）」</text:p>
          </table:table-cell>
        </table:table-row>
      </table:table>
      <text:p text:style-name="P108"/>
      <text:p text:style-name="P110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3"><text:span text:style-name="T53">AVL Tree</text:span> = <text:span text:style-name="T8">自動保持平衡</text:span>的 <text:span text:style-name="T36">BST（Binary Search Tree）</text:span></text:p>
            <text:p text:style-name="P73">✔<text:span text:style-name="T75"> 是二元樹</text:span>（每節點最多 2 個 child）</text:p>
            <text:p text:style-name="P73">✔ 同時也是 <text:span text:style-name="T27">BST（左 &lt; 根 &lt; 右）</text:span></text:p>
            <text:p text:style-name="P73">✔ 額外保證：<text:span text:style-name="T38">任何節點的「平衡因子」絕對值 </text:span><text:span text:style-name="T10">≤ 1</text:span></text:p>
          </table:table-cell>
        </table:table-row>
      </table:table>
      <text:p text:style-name="P108"/>
      <text:h text:style-name="P6" text:outline-level="2">AVL-1　平衡因子（Balance Factor）</text:h>
      <text:p text:style-name="P82"><text:span text:style-name="T48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16">平衡因子（BF）= 左子樹高度 − 右子樹高度</text:p>
            <text:p text:style-name="P111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91">BF ≥ 2 或 ≤ -2 <text:s/>→ 失衡！必須旋轉修復</text:p>
          </table:table-cell>
        </table:table-row>
      </table:table>
      <text:p text:style-name="P108"/>
      <text:p text:style-name="P82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08"/>
      <text:h text:style-name="P6" text:outline-level="2">AVL-2　四種旋轉（超重要，考試必考）</text:h>
      <text:p text:style-name="P82"><text:span text:style-name="T66">只要插入或刪除後有節點的 BF 超出範圍</text:span>，<text:span text:style-name="T53">就立刻旋轉修復</text:span>。共有 4 種情況：</text:p>
      <text:p text:style-name="P108"/>
      <text:p text:style-name="P70">旋轉一：LL 旋轉（新節點插入在<text:span text:style-name="T48">失衡節點左子樹</text:span>的左邊）</text:p>
      <text:p text:style-name="P82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59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67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10"/>
          </table:table-cell>
          <table:table-cell table:style-name="表格87.B1" office:value-type="string">
            <text:p text:style-name="P48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13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10"/>
          </table:table-cell>
        </table:table-row>
      </table:table>
      <text:p text:style-name="P108"/>
      <text:p text:style-name="P70">旋轉二：RR 旋轉（新節點插入在<text:span text:style-name="T48">失衡節點右子樹</text:span>的右邊）</text:p>
      <text:p text:style-name="P82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59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67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10"/>
          </table:table-cell>
          <table:table-cell table:style-name="表格90.B1" office:value-type="string">
            <text:p text:style-name="P48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13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10"/>
          </table:table-cell>
        </table:table-row>
      </table:table>
      <text:p text:style-name="P108"/>
      <text:p text:style-name="P70">旋轉三：<text:span text:style-name="T48">LR </text:span>旋轉（新節點插入在<text:span text:style-name="T48">失衡節點左子樹</text:span>的右邊）</text:p>
      <text:p text:style-name="P82">解法：<text:span text:style-name="T27">先對左子節點做左旋</text:span>，<text:span text:style-name="T17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59">左旋</text:span> 20： <text:s text:c="5"/>第二步：<text:span text:style-name="T59">右旋</text:span> 30：</text:p>
            <text:p text:style-name="P30"><text:s text:c="4"/>30 (BF=2) <text:s text:c="16"/>30 (BF=2) <text:s text:c="13"/><text:span text:style-name="T53">25</text:span> (BF=0)</text:p>
            <text:p text:style-name="P30"><text:s text:c="3"/>/ <text:s text:c="24"/>/ <text:s text:c="21"/>/ <text:s/>\</text:p>
            <text:p text:style-name="P30"><text:s text:c="2"/><text:span text:style-name="T67">20</text:span> (BF=-1) <text:s text:c="14"/><text:span text:style-name="T53">25</text:span> (BF=1) <text:s text:c="11"/>20 <text:s text:c="4"/><text:span text:style-name="T53">30</text:span></text:p>
            <text:p text:style-name="P30"><text:s text:c="4"/>\ <text:s text:c="21"/>/</text:p>
            <text:p text:style-name="P30"><text:s text:c="4"/>25 <text:s/>← 新節點 <text:s text:c="8"/><text:span text:style-name="T53">20</text:span></text:p>
          </table:table-cell>
        </table:table-row>
      </table:table>
      <text:p text:style-name="P108"/>
      <text:p text:style-name="P70">旋轉四：<text:span text:style-name="T48">RL</text:span> 旋轉（新節點插入在<text:span text:style-name="T48">失衡節點右子樹</text:span>的左邊）</text:p>
      <text:p text:style-name="P82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08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82"><text:span text:style-name="T46">BF ≥ 2</text:span>（<text:span text:style-name="T48">左重</text:span>）</text:p>
          </table:table-cell>
          <table:table-cell table:style-name="表格95.C2" office:value-type="string">
            <text:p text:style-name="P85">左子樹的左邊</text:p>
          </table:table-cell>
          <table:table-cell table:style-name="表格95.D2" office:value-type="string">
            <text:p text:style-name="P82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82"><text:span text:style-name="T46">BF ≤ -2</text:span>（<text:span text:style-name="T69">右重</text:span>）</text:p>
          </table:table-cell>
          <table:table-cell table:style-name="表格95.C3" office:value-type="string">
            <text:p text:style-name="P85">右子樹的右邊</text:p>
          </table:table-cell>
          <table:table-cell table:style-name="表格95.D3" office:value-type="string">
            <text:p text:style-name="P82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82"><text:span text:style-name="T70">BF ≥ 2</text:span>（<text:span text:style-name="T72">左重</text:span>）</text:p>
          </table:table-cell>
          <table:table-cell table:style-name="表格95.C4" office:value-type="string">
            <text:p text:style-name="P87">左子樹的右邊</text:p>
          </table:table-cell>
          <table:table-cell table:style-name="表格95.D4" office:value-type="string">
            <text:p text:style-name="P82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82"><text:span text:style-name="T70">BF ≤ -2</text:span>（<text:span text:style-name="T72">右重</text:span>）</text:p>
          </table:table-cell>
          <table:table-cell table:style-name="表格95.C5" office:value-type="string">
            <text:p text:style-name="P87">右子樹的左邊</text:p>
          </table:table-cell>
          <table:table-cell table:style-name="表格95.D5" office:value-type="string">
            <text:p text:style-name="P82">先右旋再左旋</text:p>
          </table:table-cell>
        </table:table-row>
      </table:table>
      <text:p text:style-name="P108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54">AVL Tree <text:span text:style-name="T27">高度永遠維持在 O(log n)</text:span></text:p>
            <text:p text:style-name="P111"><text:soft-page-break/><text:span text:style-name="T73">搜尋：O(log n) <text:s text:c="2"/>插入：O(log n) <text:s text:c="2"/>刪除：O(log n)</text:span></text:p>
            <text:p text:style-name="P111"/>
            <text:p text:style-name="P54">代價：<text:span text:style-name="T44">每次插入/刪除後都要「往上回頭檢查每個節點的 BF」</text:span>，可能旋轉多次</text:p>
            <text:p text:style-name="P54">→ 如果需要大量插入刪除，Red-Black Tree 可能更適合</text:p>
          </table:table-cell>
        </table:table-row>
      </table:table>
      <text:p text:style-name="P110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0">Red-Black Tree（紅黑樹）= <text:span text:style-name="T46">每個節點標記「紅色或黑色」</text:span>的<text:span text:style-name="T36">自平衡 BST</text:span></text:p>
            <text:p text:style-name="P100">✔ <text:span text:style-name="T75">是二元樹</text:span>（每節點最多 2 個 child）</text:p>
            <text:p text:style-name="P100">✔ 同時也是 <text:span text:style-name="T27">BST（左 &lt; 根 &lt; 右）</text:span></text:p>
            <text:p text:style-name="P100">✔ <text:span text:style-name="T55">用</text:span><text:span text:style-name="T39">顏色</text:span><text:span text:style-name="T55">規則</text:span><text:span text:style-name="T39">取代</text:span><text:span text:style-name="T55">嚴格的高度差限制</text:span>，效能更穩定</text:p>
          </table:table-cell>
        </table:table-row>
      </table:table>
      <text:p text:style-name="P108"/>
      <text:h text:style-name="P6" text:outline-level="2">RBT-1　五條規則（缺一不可）</text:h>
      <text:p text:style-name="P82">每棵 Red-Black Tree 必須同時滿足以下五條：</text:p>
      <text:p text:style-name="P108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03">規則1</text:p>
          </table:table-cell>
          <table:table-cell table:style-name="表格98.B1" office:value-type="string">
            <text:p text:style-name="P82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03">規則2</text:p>
          </table:table-cell>
          <table:table-cell table:style-name="表格98.B2" office:value-type="string">
            <text:p text:style-name="P119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03">規則3</text:p>
          </table:table-cell>
          <table:table-cell table:style-name="表格98.B3" office:value-type="string">
            <text:p text:style-name="P121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03">規則4</text:p>
          </table:table-cell>
          <table:table-cell table:style-name="表格98.B4" office:value-type="string">
            <text:p text:style-name="P82">紅色節點的小孩一定是黑色（<text:span text:style-name="T36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03">規則5</text:p>
          </table:table-cell>
          <table:table-cell table:style-name="表格98.B5" office:value-type="string">
            <text:p text:style-name="P82">從<text:span text:style-name="T53">任意節點到</text:span><text:span text:style-name="T81">其</text:span><text:span text:style-name="T32">所有</text:span><text:span text:style-name="T81">葉節點</text:span><text:span text:style-name="T53">的路徑</text:span>，<text:span text:style-name="T75">黑色節點數量相同</text:span>（<text:span text:style-name="T38">黑高度相同</text:span>）</text:p>
          </table:table-cell>
        </table:table-row>
      </table:table>
      <text:p text:style-name="P108"/>
      <text:h text:style-name="P8" text:outline-level="2">RBT-2　視覺化說明（含 NIL 節點完整版）</text:h>
      <text:p text:style-name="P12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3">⚠️ 超重要陷阱：<text:span text:style-name="T32">Red-Black Tree 的「葉節點」和 Binary Tree 的「葉節點」</text:span><text:span text:style-name="T45">不同！</text:span></text:p>
            <text:p text:style-name="P123"/>
            <text:p text:style-name="P120">Binary Tree 的葉節點 = 沒有小孩的實際資料節點（如 3、7、30）</text:p>
            <text:p text:style-name="P92">Red-Black Tree 的葉節點 = NIL（NULL）節點</text:p>
            <text:p text:style-name="P43"><text:s text:c="26"/>↑ 也就是<text:span text:style-name="T77">每個實際節點下面「空的位置」</text:span></text:p>
            <text:p text:style-name="P123"/>
            <text:p text:style-name="P43">規則3<text:span text:style-name="T17">「所有葉節點都是黑色」真正的意思是</text:span>：<text:span text:style-name="T75">所有 NIL 都是黑色</text:span></text:p>
            <text:p text:style-name="P43">不是說「所有沒有小孩的實際資料節點都必須是黑色」！</text:p>
          </table:table-cell>
        </table:table-row>
      </table:table>
      <text:p text:style-name="P122"/>
      <text:p text:style-name="P71">省略版（教科書常見畫法，<text:span text:style-name="T33">NIL 不畫出來</text:span>）</text:p>
      <text:p text:style-name="P84">一般教材<text:span text:style-name="T46">為了簡潔</text:span>，<text:span text:style-name="T75">把 NIL 節點全部省略</text:span>，<text:span text:style-name="T46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24"><text:soft-page-break/></text:p>
            <text:p text:style-name="P31">← <text:span text:style-name="T46">這棵樹看起來 30(R) 是葉子</text:span>，<text:span text:style-name="T82">卻是紅色</text:span>，<text:span text:style-name="T75">初學者會以為違規！</text:span></text:p>
            <text:p text:style-name="P31"><text:s text:c="3"/>但<text:span text:style-name="T27">其實 30 下面還有兩個 NIL(B)</text:span>，所以規則3仍然成立。</text:p>
          </table:table-cell>
        </table:table-row>
      </table:table>
      <text:p text:style-name="P122"/>
      <text:p text:style-name="P71">完整版（含所有 NIL 節點）</text:p>
      <text:p text:style-name="P84"><text:span text:style-name="T27">把所有 NIL 節點畫出來</text:span>，<text:span text:style-name="T16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46">NIL(B)</text:span> <text:s/>R:30</text:p>
            <text:p text:style-name="P31"><text:s text:c="11"/>/ \ <text:s text:c="2"/>/ \ <text:s text:c="9"/>/ <text:s text:c="3"/>\</text:p>
            <text:p text:style-name="P31"><text:s text:c="8"/><text:span text:style-name="T46">NIL</text:span> <text:span text:style-name="T46">NIL</text:span> <text:span text:style-name="T46">NIL</text:span> <text:span text:style-name="T46">NIL</text:span> <text:s text:c="4"/><text:span text:style-name="T46">NIL</text:span> <text:s text:c="2"/><text:span text:style-name="T46">NIL</text:span></text:p>
            <text:p text:style-name="P31"><text:s text:c="8"/><text:span text:style-name="T46">(B)</text:span> <text:span text:style-name="T46">(B)</text:span> <text:span text:style-name="T46">(B)</text:span> <text:span text:style-name="T46">(B)</text:span> <text:s text:c="4"/><text:span text:style-name="T46">(B)</text:span> <text:s text:c="2"/><text:span text:style-name="T46">(B)</text:span></text:p>
            <text:p text:style-name="P124"/>
            <text:p text:style-name="P31">← <text:span text:style-name="T20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22"/>
      <text:p text:style-name="P71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05">規則</text:p>
          </table:table-cell>
          <table:table-cell table:style-name="表格115.A1" office:value-type="string">
            <text:p text:style-name="P105">結果</text:p>
          </table:table-cell>
          <table:table-cell table:style-name="表格115.A1" office:value-type="string">
            <text:p text:style-name="P105">說明</text:p>
          </table:table-cell>
        </table:table-row>
        <table:table-row table:style-name="表格115.1">
          <table:table-cell table:style-name="表格115.A2" office:value-type="string">
            <text:p text:style-name="P106">規則1</text:p>
          </table:table-cell>
          <table:table-cell table:style-name="表格115.B2" office:value-type="string">
            <text:p text:style-name="P50">✅ 成立</text:p>
          </table:table-cell>
          <table:table-cell table:style-name="表格115.C2" office:value-type="string">
            <text:p text:style-name="P84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06">規則2</text:p>
          </table:table-cell>
          <table:table-cell table:style-name="表格115.B2" office:value-type="string">
            <text:p text:style-name="P50">✅ 成立</text:p>
          </table:table-cell>
          <table:table-cell table:style-name="表格115.C3" office:value-type="string">
            <text:p text:style-name="P86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06">規則3</text:p>
          </table:table-cell>
          <table:table-cell table:style-name="表格115.B2" office:value-type="string">
            <text:p text:style-name="P50">✅ 成立</text:p>
          </table:table-cell>
          <table:table-cell table:style-name="表格115.C4" office:value-type="string">
            <text:p text:style-name="P84"><text:span text:style-name="T46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06">規則4</text:p>
          </table:table-cell>
          <table:table-cell table:style-name="表格115.B2" office:value-type="string">
            <text:p text:style-name="P50">✅ 成立</text:p>
          </table:table-cell>
          <table:table-cell table:style-name="表格115.C5" office:value-type="string">
            <text:p text:style-name="P84">R:5 的小孩是 B:3 和 B:7（黑）；<text:span text:style-name="T70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06">規則5</text:p>
          </table:table-cell>
          <table:table-cell table:style-name="表格115.B2" office:value-type="string">
            <text:p text:style-name="P50">✅ 成立</text:p>
          </table:table-cell>
          <table:table-cell table:style-name="表格115.C6" office:value-type="string">
            <text:p text:style-name="P84">見下方黑高計算</text:p>
          </table:table-cell>
        </table:table-row>
      </table:table>
      <text:p text:style-name="P122"/>
      <text:p text:style-name="P71">規則5 詳細計算（黑高度一致性）</text:p>
      <text:p text:style-name="P84">每條從 root 到 NIL 的路徑，計算黑色節點數（<text:span text:style-name="T46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24"/>
            <text:p text:style-name="P31">【算 NIL 的版本（教科書正式版）】</text:p>
            <text:p text:style-name="P124"><text:soft-page-break/><text:span text:style-name="T42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2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02">📌 考試應對方式：</text:p>
            <text:p text:style-name="P123"/>
            <text:p text:style-name="P102">看到「葉節點都是黑色」→ 腦中自動翻譯成「所有 NIL 都是黑色」</text:p>
            <text:p text:style-name="P123"/>
            <text:p text:style-name="P107">看到 30(R) 是「葉子」卻是紅色 → 不要以為違規！</text:p>
            <text:p text:style-name="P102"><text:s text:c="2"/><text:span text:style-name="T17">30(R) 的正式葉節點是它下面的兩個 NIL(B)</text:span>，規則3 仍然成立。</text:p>
            <text:p text:style-name="P123"/>
            <text:p text:style-name="P102">計算黑高時：含 NIL 或不含 NIL 都可以，只要整棵樹算法一致即可。</text:p>
          </table:table-cell>
        </table:table-row>
      </table:table>
      <text:p text:style-name="P122"/>
      <text:h text:style-name="P7" text:outline-level="2">RBT-3　為什麼「顏色」能保持平衡？</text:h>
      <text:p text:style-name="P83"><text:span text:style-name="T36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01">因為紅色節點不能連續出現（規則4），</text:p>
            <text:p text:style-name="P101">最長的路徑（紅黑交替）最多是最短路徑（全黑）的 2 倍。</text:p>
            <text:p text:style-name="P112"/>
            <text:p text:style-name="P101">因此 Red-Black Tree 的高度保證在 2 × log₂(n+1) 以內</text:p>
            <text:p text:style-name="P101">→ 搜尋、插入、刪除仍然是 O(log n)</text:p>
          </table:table-cell>
        </table:table-row>
      </table:table>
      <text:p text:style-name="P109"/>
      <text:h text:style-name="P6" text:outline-level="2">RBT-4　插入後如何修復？</text:h>
      <text:p text:style-name="P132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134">如果塗黑色</text:p>
            <text:p text:style-name="P154">一定增加某條路徑的黑高</text:p>
            <text:p text:style-name="P135">違反規則5（黑高一致）</text:p>
            <text:p text:style-name="P135">→ 黑高不一致極難修復</text:p>
          </table:table-cell>
          <table:table-cell table:style-name="表格101.B1" office:value-type="string">
            <text:p text:style-name="P142">如果塗紅色 ✔</text:p>
            <text:p text:style-name="P153">黑高完全不變</text:p>
            <text:p text:style-name="P135"><text:span text:style-name="T47">只可能</text:span><text:span text:style-name="T37">違反規則4（紅紅相鄰）</text:span></text:p>
            <text:p text:style-name="P135">→ 只要<text:span text:style-name="T78">看爸爸是不是紅色即可</text:span></text:p>
          </table:table-cell>
        </table:table-row>
      </table:table>
      <text:p text:style-name="P12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45">因此插入後唯一可能的違規：自己（紅）的爸爸也是紅色</text:p>
            <text:p text:style-name="P126"/>
            <text:p text:style-name="P145">三個關鍵角色：</text:p>
            <text:p text:style-name="P145"><text:s/><text:span text:style-name="T47"><text:s/>X = 新插入節點</text:span>（<text:span text:style-name="T83">紅色</text:span>，<text:span text:style-name="T6">違規的那個</text:span>）</text:p>
            <text:p text:style-name="P145"><text:s/><text:span text:style-name="T49"><text:s/>P = X 的父節點</text:span>（<text:span text:style-name="T83">紅色</text:span><text:span text:style-name="T84">­</text:span> <text:span text:style-name="T4">→ 引發違規</text:span>）</text:p>
            <text:p text:style-name="P145"><text:s text:c="2"/>G = X 的祖父節點（一定是黑色，因為插入前整棵樹合法）</text:p>
            <text:p text:style-name="P145"><text:s text:c="2"/><text:span text:style-name="T47">U = X 的叔叔節點</text:span>（<text:span text:style-name="T28">P 的兄弟，可紅可黑</text:span>）</text:p>
          </table:table-cell>
        </table:table-row>
      </table:table>
      <text:p text:style-name="P12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148"><text:s text:c="8"/>G(B) <text:s/>← 祖父，黑色</text:p>
            <text:p text:style-name="P148"><text:s text:c="7"/>/ <text:s text:c="3"/>\</text:p>
            <text:p text:style-name="P148"><text:s text:c="5"/>P(R) <text:s text:c="2"/>U(?) <text:s/>← 叔叔，顏色決定修復方式</text:p>
            <text:p text:style-name="P148"><text:s text:c="4"/>/</text:p>
            <text:p text:style-name="P148"><text:s text:c="2"/>X(R) <text:s/>← 新節點，和 P 都是紅色，違反規則4！</text:p>
          </table:table-cell>
        </table:table-row>
      </table:table>
      <text:p text:style-name="P125"/>
      <text:p text:style-name="P128"/>
      <text:p text:style-name="P133">Case 1：<text:span text:style-name="T49">叔叔 U 是紅色</text:span> → <text:span text:style-name="T47">只改顏色</text:span>，<text:span text:style-name="T34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45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148">修復前： <text:s text:c="23"/>修復後：</text:p>
            <text:p text:style-name="P148"><text:s text:c="6"/>G(B) <text:s text:c="27"/><text:span text:style-name="T47">G(R)</text:span> ← <text:span text:style-name="T68">G 塗紅</text:span>，可能往上繼續違規</text:p>
            <text:p text:style-name="P148"><text:s text:c="5"/>/ <text:s text:c="3"/>\ <text:s text:c="25"/>/ <text:s text:c="3"/>\</text:p>
            <text:p text:style-name="P148"><text:s text:c="3"/>P(R) <text:s text:c="2"/><text:span text:style-name="T54">U(R)</text:span> <text:s text:c="9"/>→ <text:s text:c="9"/><text:span text:style-name="T47">P(B) <text:s/>U(B)</text:span> ← <text:span text:style-name="T49">兩個都塗黑</text:span></text:p>
            <text:p text:style-name="P148"><text:s text:c="3"/>/ <text:s text:c="30"/>/</text:p>
            <text:p text:style-name="P148"><text:s text:c="2"/>X(R) <text:s text:c="27"/>X(R)</text:p>
          </table:table-cell>
        </table:table-row>
      </table:table>
      <text:p text:style-name="P135">為什麼 G 要塗紅？因為 <text:span text:style-name="T80">P 和 U 都變黑，從 G 往下兩條路各多了一個黑節點</text:span>，</text:p>
      <text:p text:style-name="P135"><text:span text:style-name="T23">必須把 G 塗紅來補償黑高</text:span>，<text:span text:style-name="T58">讓規則5維持不變</text:span>。但 G 變紅後可能和 G 的父節點</text:p>
      <text:p text:style-name="P135">又違反規則4，所以要往上繼續檢查，直到 root 或不再違規為止。</text:p>
      <text:p text:style-name="P125"/>
      <text:p text:style-name="P132">Case 2：<text:span text:style-name="T49">叔叔 U 是黑色</text:span>，<text:span text:style-name="T4">且 X 是 P 的右子</text:span> → <text:span text:style-name="T34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45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148">修復前： <text:s text:c="23"/><text:span text:style-name="T37">對 P 左旋後</text:span>（變 Case 3）：</text:p>
            <text:p text:style-name="P148"><text:s text:c="6"/>G(B) <text:s text:c="27"/>G(B)</text:p>
            <text:p text:style-name="P148"><text:s text:c="5"/>/ <text:s text:c="3"/>\ <text:s text:c="25"/>/ <text:s text:c="3"/>\</text:p>
            <text:p text:style-name="P148"><text:s text:c="3"/>P(R) <text:s text:c="2"/><text:span text:style-name="T54">U(B)</text:span> <text:s text:c="9"/>→ <text:s text:c="9"/>X(R) <text:s text:c="2"/><text:span text:style-name="T47">U(B)</text:span></text:p>
            <text:p text:style-name="P148"><text:s text:c="6"/>\ <text:s text:c="27"/>/</text:p>
            <text:p text:style-name="P148"><text:s text:c="6"/>X(R) ← <text:span text:style-name="T68">X 在右邊</text:span> <text:s text:c="11"/><text:span text:style-name="T28">P(R)</text:span> ← <text:span text:style-name="T68">P 跑下去了</text:span></text:p>
            <text:p text:style-name="P127"/>
            <text:p text:style-name="P149">← 旋轉後：P 在 X 的左邊，符合 Case 3 格局，接著用 Case 3 修復</text:p>
          </table:table-cell>
        </table:table-row>
      </table:table>
      <text:p text:style-name="P125"/>
      <text:p text:style-name="P132">Case 3：<text:span text:style-name="T49">叔叔 U 是黑色</text:span>，<text:span text:style-name="T71">且 X 是 P 的左子</text:span> → <text:span text:style-name="T22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144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148">修復前： <text:s text:c="23"/><text:span text:style-name="T37">對 G 右旋</text:span> + <text:span text:style-name="T28">交換 P/G 顏色</text:span>：</text:p>
            <text:p text:style-name="P148"><text:s text:c="6"/>G(B) <text:s text:c="27"/><text:span text:style-name="T56">P(B)</text:span> ← <text:span text:style-name="T18">原本紅色</text:span>，現在黑色（當新根）</text:p>
            <text:p text:style-name="P148"><text:s text:c="5"/>/ <text:s text:c="3"/>\ <text:s text:c="25"/>/ <text:s text:c="3"/>\</text:p>
            <text:p text:style-name="P148"><text:s text:c="3"/>P(R) <text:s text:c="2"/><text:span text:style-name="T54">U(B)</text:span> <text:s text:c="9"/>→ <text:s text:c="9"/>X(R) <text:s/><text:span text:style-name="T56">G(R)</text:span> ← <text:span text:style-name="T9">原本黑色</text:span>，現在紅色</text:p>
            <text:p text:style-name="P148"><text:s text:c="3"/>/ <text:s text:c="40"/>\</text:p>
            <text:p text:style-name="P148"><text:s text:c="2"/>X(R) <text:s text:c="38"/>U(B)</text:p>
            <text:p text:style-name="P127"/>
            <text:p text:style-name="P148">← P 變黑頂替 G 的位置，黑高不變；G 變紅但右子是 U(B)，不違反規則4</text:p>
            <text:p text:style-name="P148">← 整個子樹修復完成，不需要繼續往上檢查！</text:p>
          </table:table-cell>
        </table:table-row>
      </table:table>
      <text:p text:style-name="P125"/>
      <text:p text:style-name="P132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46">Case</text:p>
          </table:table-cell>
          <table:table-cell table:style-name="表格123.A1" office:value-type="string">
            <text:p text:style-name="P146">叔叔顏色</text:p>
          </table:table-cell>
          <table:table-cell table:style-name="表格123.A1" office:value-type="string">
            <text:p text:style-name="P146">X 的位置</text:p>
          </table:table-cell>
          <table:table-cell table:style-name="表格123.A1" office:value-type="string">
            <text:p text:style-name="P146">操作</text:p>
          </table:table-cell>
          <table:table-cell table:style-name="表格123.A1" office:value-type="string">
            <text:p text:style-name="P146">繼續往上？</text:p>
          </table:table-cell>
        </table:table-row>
        <table:table-row table:style-name="表格123.1">
          <table:table-cell table:style-name="表格123.A2" office:value-type="string">
            <text:p text:style-name="P147">Case 1</text:p>
          </table:table-cell>
          <table:table-cell table:style-name="表格123.B2" office:value-type="string">
            <text:p text:style-name="P155">紅</text:p>
          </table:table-cell>
          <table:table-cell table:style-name="表格123.C2" office:value-type="string">
            <text:p text:style-name="P135">左或右皆可</text:p>
          </table:table-cell>
          <table:table-cell table:style-name="表格123.D2" office:value-type="string">
            <text:p text:style-name="P135">P、U 塗黑；G 塗紅</text:p>
          </table:table-cell>
          <table:table-cell table:style-name="表格123.E2" office:value-type="string">
            <text:p text:style-name="P150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47">Case 2</text:p>
          </table:table-cell>
          <table:table-cell table:style-name="表格123.B3" office:value-type="string">
            <text:p text:style-name="P156">黑</text:p>
          </table:table-cell>
          <table:table-cell table:style-name="表格123.C3" office:value-type="string">
            <text:p text:style-name="P140">P 的右子</text:p>
          </table:table-cell>
          <table:table-cell table:style-name="表格123.D3" office:value-type="string">
            <text:p text:style-name="P135">對 P 左旋 → <text:span text:style-name="T37">變 Case 3</text:span></text:p>
          </table:table-cell>
          <table:table-cell table:style-name="表格123.A1" office:value-type="string">
            <text:p text:style-name="P147">接著 Case 3</text:p>
          </table:table-cell>
        </table:table-row>
        <table:table-row table:style-name="表格123.1">
          <table:table-cell table:style-name="表格123.A4" office:value-type="string">
            <text:p text:style-name="P147">Case 3</text:p>
          </table:table-cell>
          <table:table-cell table:style-name="表格123.B4" office:value-type="string">
            <text:p text:style-name="P156">黑</text:p>
          </table:table-cell>
          <table:table-cell table:style-name="表格123.C4" office:value-type="string">
            <text:p text:style-name="P141">P 的左子</text:p>
          </table:table-cell>
          <table:table-cell table:style-name="表格123.D4" office:value-type="string">
            <text:p text:style-name="P135">對 G 右旋 + <text:span text:style-name="T28">交換 P/G 顏色</text:span></text:p>
          </table:table-cell>
          <table:table-cell table:style-name="表格123.E4" office:value-type="string">
            <text:p text:style-name="P143">❌ 完成！</text:p>
          </table:table-cell>
        </table:table-row>
      </table:table>
      <text:p text:style-name="P12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151">⚠️ <text:span text:style-name="T47">以上三個 Case 的前提</text:span>：<text:span text:style-name="T18">P 是 G 的左子節點</text:span></text:p>
            <text:p text:style-name="P151"><text:span text:style-name="T76">若 P 是 G 的右子節點 → 做法完全對稱</text:span>（左右鏡像互換）：</text:p>
            <text:p text:style-name="P152"><text:s text:c="2"/>Case 2 變成：<text:span text:style-name="T4">X 在 P 的右子</text:span> → <text:span text:style-name="T9">對 P 左旋</text:span></text:p>
            <text:p text:style-name="P152"><text:s text:c="2"/>Case 3 變成：<text:span text:style-name="T92">X 在 P 的左子</text:span> → <text:span text:style-name="T9">對 G 右旋</text:span> + <text:span text:style-name="T28">交換顏色</text:span></text:p>
            <text:p text:style-name="P126"/>
            <text:p text:style-name="P151">最後一步：無論哪個 Case，修復結束後強制把 root 塗成黑色（規則2）。</text:p>
          </table:table-cell>
        </table:table-row>
      </table:table>
      <text:p text:style-name="P12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10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82">✔ 是</text:p>
          </table:table-cell>
          <table:table-cell table:style-name="表格102.C2" office:value-type="string">
            <text:p text:style-name="P82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82">✔ 是</text:p>
          </table:table-cell>
          <table:table-cell table:style-name="表格102.C3" office:value-type="string">
            <text:p text:style-name="P82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82">嚴格高度差 ≤ 1</text:p>
          </table:table-cell>
          <table:table-cell table:style-name="表格102.C4" office:value-type="string">
            <text:p text:style-name="P82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82">更嚴格（更矮）</text:p>
          </table:table-cell>
          <table:table-cell table:style-name="表格102.C5" office:value-type="string">
            <text:p text:style-name="P82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138">略快</text:p>
          </table:table-cell>
          <table:table-cell table:style-name="表格102.C6" office:value-type="string">
            <text:p text:style-name="P139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82">較慢（旋轉多）</text:p>
          </table:table-cell>
          <table:table-cell table:style-name="表格102.C7" office:value-type="string">
            <text:p text:style-name="P82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136">讀多寫少</text:p>
          </table:table-cell>
          <table:table-cell table:style-name="表格102.C8" office:value-type="string">
            <text:p text:style-name="P137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82">少數特殊場景</text:p>
          </table:table-cell>
          <table:table-cell table:style-name="表格102.C9" office:value-type="string">
            <text:p text:style-name="P82">C++ map、Java TreeMap、Linux 排程</text:p>
          </table:table-cell>
        </table:table-row>
      </table:table>
      <text:p text:style-name="P110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2">⚠️ B-Tree 不是二元樹！</text:p>
            <text:p text:style-name="P42">Binary Tree = 每個節點最多 2 個子節點</text:p>
            <text:p text:style-name="P42">B-Tree = 每個節點可以有很多個 key 和很多個子節點（階數決定上限）</text:p>
            <text:p text:style-name="P42">B-Tree 是「多元搜尋樹（M-ary Search Tree）」</text:p>
          </table:table-cell>
        </table:table-row>
      </table:table>
      <text:p text:style-name="P108"/>
      <text:h text:style-name="P6" text:outline-level="2">BT-1　為什麼要發明 B-Tree？</text:h>
      <text:p text:style-name="P82">回憶 BST 和 AVL Tree 的問題：它們都假設資料在記憶體（RAM）裡。</text:p>
      <text:p text:style-name="P82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2">RAM <text:s/>讀取速度：奈秒（ns）級，約 100 ns</text:p>
            <text:p text:style-name="P42">磁碟 讀取速度：毫秒（ms）級，約 5~10 ms</text:p>
            <text:p text:style-name="P111"/>
            <text:p text:style-name="P42">磁碟比 RAM 慢約 100,000 倍！</text:p>
            <text:p text:style-name="P111"/>
            <text:p text:style-name="P42">BST 有 100 萬筆資料 → 需要 log₂(1,000,000) ≈ 20 次磁碟讀取</text:p>
            <text:p text:style-name="P42">B-Tree（階數500）→ 只需 log₅₀₀(1,000,000) ≈ 4 次磁碟讀取</text:p>
            <text:p text:style-name="P42">→ B-Tree 讓磁碟讀取次數從 20 降到 4，快了 5 倍！</text:p>
          </table:table-cell>
        </table:table-row>
      </table:table>
      <text:p text:style-name="P108"/>
      <text:h text:style-name="P6" text:outline-level="2">BT-2　B-Tree 的結構</text:h>
      <text:p text:style-name="P82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階數（Order）m」定義了節點的上限：</text:p>
            <text:p text:style-name="P16"><text:s text:c="2"/>每個節點最多 m 個子節點，最多 m-1 個 key</text:p>
            <text:p text:style-name="P16"><text:s text:c="2"/>每個非 root 節點最少 ⌈m/2⌉ 個子節點</text:p>
          </table:table-cell>
        </table:table-row>
      </table:table>
      <text:p text:style-name="P108"/>
      <text:p text:style-name="P82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[20 | 50] <text:s text:c="15"/>← root，有 2 個 key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13"/>
            <text:p text:style-name="P30">規則（同 BST 概念，但擴展到多個 key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08"/>
      <text:h text:style-name="P114" text:outline-level="2"><text:soft-page-break/><text:span text:style-name="T74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82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82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82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82">刪除後若節點太少，與兄弟合併或借 key</text:p>
          </table:table-cell>
        </table:table-row>
      </table:table>
      <text:p text:style-name="P108"/>
      <text:h text:style-name="P6" text:outline-level="2">BT-4　B+Tree（資料庫最常用）</text:h>
      <text:p text:style-name="P82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29">所有節點都存 key 和 data</text:p>
              </text:list-item>
              <text:list-item>
                <text:p text:style-name="P129">搜尋可能在中間節點就結束</text:p>
              </text:list-item>
              <text:list-item>
                <text:p text:style-name="P129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29">內部節點只存 key，data 只放葉節點</text:p>
              </text:list-item>
              <text:list-item>
                <text:p text:style-name="P129">搜尋一定走到葉節點才結束</text:p>
              </text:list-item>
              <text:list-item>
                <text:p text:style-name="P129">所有葉節點串成一條 Linked List，範圍查詢超快</text:p>
              </text:list-item>
            </text:list>
          </table:table-cell>
        </table:table-row>
      </table:table>
      <text:p text:style-name="P108"/>
      <text:p text:style-name="P82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08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82">B+Tree</text:p>
          </table:table-cell>
          <table:table-cell table:style-name="表格110.C2" office:value-type="string">
            <text:p text:style-name="P82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82">B+Tree</text:p>
          </table:table-cell>
          <table:table-cell table:style-name="表格110.C3" office:value-type="string">
            <text:p text:style-name="P82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82">B+Tree</text:p>
          </table:table-cell>
          <table:table-cell table:style-name="表格110.C4" office:value-type="string">
            <text:p text:style-name="P82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82">B+Tree</text:p>
          </table:table-cell>
          <table:table-cell table:style-name="表格110.C5" office:value-type="string">
            <text:p text:style-name="P82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82">HTree（B-Tree衍生）</text:p>
          </table:table-cell>
          <table:table-cell table:style-name="表格110.C6" office:value-type="string">
            <text:p text:style-name="P82">大目錄索引</text:p>
          </table:table-cell>
        </table:table-row>
      </table:table>
      <text:p text:style-name="P108"/>
      <text:h text:style-name="P114" text:outline-level="2"><text:soft-page-break/><text:span text:style-name="T74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104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82">✔ 是</text:p>
          </table:table-cell>
          <table:table-cell table:style-name="表格111.C2" office:value-type="string">
            <text:p text:style-name="P82">✔ 是</text:p>
          </table:table-cell>
          <table:table-cell table:style-name="表格111.D2" office:value-type="string">
            <text:p text:style-name="P82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82">✔ 是</text:p>
          </table:table-cell>
          <table:table-cell table:style-name="表格111.C3" office:value-type="string">
            <text:p text:style-name="P82">✔ 是</text:p>
          </table:table-cell>
          <table:table-cell table:style-name="表格111.D3" office:value-type="string">
            <text:p text:style-name="P82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82">最多 2</text:p>
          </table:table-cell>
          <table:table-cell table:style-name="表格111.C4" office:value-type="string">
            <text:p text:style-name="P82">最多 2</text:p>
          </table:table-cell>
          <table:table-cell table:style-name="表格111.D4" office:value-type="string">
            <text:p text:style-name="P82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82">BF ≤ 1（旋轉）</text:p>
          </table:table-cell>
          <table:table-cell table:style-name="表格111.C5" office:value-type="string">
            <text:p text:style-name="P82">顏色規則（旋轉）</text:p>
          </table:table-cell>
          <table:table-cell table:style-name="表格111.D5" office:value-type="string">
            <text:p text:style-name="P82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82">最矮</text:p>
          </table:table-cell>
          <table:table-cell table:style-name="表格111.C6" office:value-type="string">
            <text:p text:style-name="P82">略高</text:p>
          </table:table-cell>
          <table:table-cell table:style-name="表格111.D6" office:value-type="string">
            <text:p text:style-name="P82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82">O(log n)</text:p>
          </table:table-cell>
          <table:table-cell table:style-name="表格111.C7" office:value-type="string">
            <text:p text:style-name="P82">O(log n)</text:p>
          </table:table-cell>
          <table:table-cell table:style-name="表格111.D7" office:value-type="string">
            <text:p text:style-name="P82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82">O(log n)，旋轉多</text:p>
          </table:table-cell>
          <table:table-cell table:style-name="表格111.C8" office:value-type="string">
            <text:p text:style-name="P82">O(log n)，旋轉少</text:p>
          </table:table-cell>
          <table:table-cell table:style-name="表格111.D8" office:value-type="string">
            <text:p text:style-name="P82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82">記憶體</text:p>
          </table:table-cell>
          <table:table-cell table:style-name="表格111.C9" office:value-type="string">
            <text:p text:style-name="P82">記憶體</text:p>
          </table:table-cell>
          <table:table-cell table:style-name="表格111.D9" office:value-type="string">
            <text:p text:style-name="P82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82">特殊記憶體搜尋</text:p>
          </table:table-cell>
          <table:table-cell table:style-name="表格111.C10" office:value-type="string">
            <text:p text:style-name="P82">C++ map / Java / Linux</text:p>
          </table:table-cell>
          <table:table-cell table:style-name="表格111.D10" office:value-type="string">
            <text:p text:style-name="P82">資料庫索引、檔案系統</text:p>
          </table:table-cell>
        </table:table-row>
      </table:table>
      <text:p text:style-name="P108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4">🎯 核心記憶口訣：</text:p>
            <text:p text:style-name="P54">AVL Tree = 二元樹 + 嚴格平衡（BF ≤ 1）→ 讀多寫少場景</text:p>
            <text:p text:style-name="P54">Red-Black Tree = 二元樹 + 顏色規則 → 讀寫平衡場景（最常用）</text:p>
            <text:p text:style-name="P54">B-Tree = 多元樹 + 磁碟優化 → 資料庫/檔案系統（不是二元樹！）</text:p>
          </table:table-cell>
        </table:table-row>
      </table:table>
      <text:p text:style-name="P115"/>
      <text:h text:style-name="P24" text:outline-level="1">第四章：樹的走訪（Traversal）</text:h>
      <text:p text:style-name="P34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68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68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68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4">Preorder（前序）</text:p>
            <text:p text:style-name="P34">Inorder（中序）</text:p>
            <text:p text:style-name="P34">Postorder（後序）</text:p>
          </table:table-cell>
          <table:table-cell table:style-name="表格24.B1" office:value-type="string">
            <text:p text:style-name="P22">結果</text:p>
            <text:p text:style-name="P34">A B D E C</text:p>
            <text:p text:style-name="P34">D B E A C</text:p>
            <text:p text:style-name="P34">D E B C A</text:p>
          </table:table-cell>
        </table:table-row>
      </table:table>
      <text:p text:style-name="P11"/>
      <text:h text:style-name="P117" text:outline-level="2"><text:soft-page-break/><text:span text:style-name="T74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4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4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4">一路往深處鑽</text:p>
            <text:p text:style-name="P34">使用 Stack（堆疊）/ 遞迴</text:p>
            <text:p text:style-name="P34">三種：Preorder / Inorder / Postorder</text:p>
            <text:p text:style-name="P34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4">一層一層掃描</text:p>
            <text:p text:style-name="P34">使用 Queue（佇列）</text:p>
            <text:p text:style-name="P34">一種：Level-order</text:p>
            <text:p text:style-name="P34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4">前序 + 中序</text:p>
          </table:table-cell>
          <table:table-cell table:style-name="表格28.B2" office:value-type="string">
            <text:p text:style-name="P49">✅ 可以</text:p>
          </table:table-cell>
          <table:table-cell table:style-name="表格28.C2" office:value-type="string">
            <text:p text:style-name="P34">中序可切出左右子樹</text:p>
          </table:table-cell>
        </table:table-row>
        <table:table-row table:style-name="表格28.1">
          <table:table-cell table:style-name="表格28.A3" office:value-type="string">
            <text:p text:style-name="P34">後序 + 中序</text:p>
          </table:table-cell>
          <table:table-cell table:style-name="表格28.B2" office:value-type="string">
            <text:p text:style-name="P49">✅ 可以</text:p>
          </table:table-cell>
          <table:table-cell table:style-name="表格28.C3" office:value-type="string">
            <text:p text:style-name="P34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4">前序 + 後序</text:p>
          </table:table-cell>
          <table:table-cell table:style-name="表格28.B4" office:value-type="string">
            <text:p text:style-name="P60">❌ 不唯一</text:p>
          </table:table-cell>
          <table:table-cell table:style-name="表格28.C4" office:value-type="string">
            <text:p text:style-name="P34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9">⚠️ 前序 + 後序何時例外可唯一重建？</text:p>
            <text:p text:style-name="P39">→ 只有當樹中沒有 degree=1 的節點（即 Full Binary Tree）時，才能唯一重建。</text:p>
            <text:p text:style-name="P39">→ 若有 degree=1 的節點，則共有 2^k 種可能（k = degree-1 節點數）。</text:p>
            <text:p text:style-name="P39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4">已知：</text:p>
      <text:list text:style-name="WWNum3">
        <text:list-item text:start-value="1">
          <text:p text:style-name="P130">前序（Preorder）：A B C D E F G H I</text:p>
        </text:list-item>
        <text:list-item>
          <text:p text:style-name="P130">中序（Inorder）：B C A E D G H F I</text:p>
        </text:list-item>
      </text:list>
      <text:p text:style-name="P11"/>
      <text:p text:style-name="P34">步驟一：Preorder 第一個 = A = root</text:p>
      <text:p text:style-name="P34">步驟二：在 Inorder 找 A → 左邊 {B C} = 左子樹；右邊 {E D G H F I} = 右子樹</text:p>
      <text:p text:style-name="P34">步驟三：Preorder 中，A 後面2個（B C）對應左子樹 → 第一個 B = 左子樹 root</text:p>
      <text:p text:style-name="P34">步驟四：在 Inorder {B C} 找 B → 左邊 {} 空 → 右邊 {C}</text:p>
      <text:p text:style-name="P34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46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5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4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38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38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74">定義：每個節點的子節點數只能是 0 或 2，不能是 1。</text:p>
            <text:p text:style-name="P74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46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5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4">限制「形狀」</text:p>
            <text:p text:style-name="P34">最後一層靠左</text:p>
            <text:p text:style-name="P34">Heap 一定是 CBT</text:p>
            <text:p text:style-name="P34">可以有 degree=1 的節點</text:p>
          </table:table-cell>
          <table:table-cell table:style-name="表格38.B1" office:value-type="string">
            <text:p text:style-name="P22">Full Binary Tree</text:p>
            <text:p text:style-name="P34">限制「每個節點的度數」</text:p>
            <text:p text:style-name="P34">每節點 0 或 2 個 child</text:p>
            <text:p text:style-name="P34">不一定是 CBT</text:p>
            <text:p text:style-name="P34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18">Heap = 完全二元樹（Complete Binary Tree）+ 父子大小關係</text:p>
            <text:p text:style-name="P38"/>
            <text:p text:style-name="P118">Max Heap：每個父節點 ≥ 子節點（最大值永遠在 root）</text:p>
            <text:p text:style-name="P118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4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4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9">Heap：只管「父 &gt; 子」（或父 &lt; 子），左右之間沒有大小關係</text:p>
            <text:p text:style-name="P39">BST：嚴格規定「左 &lt; 根 &lt; 右」</text:p>
            <text:p text:style-name="P38"/>
            <text:p text:style-name="P39">例： <text:s text:c="6"/>100 <text:s text:c="10"/>← Max Heap ✅（100&gt;80, 100&gt;50）</text:p>
            <text:p text:style-name="P39"><text:s text:c="10"/>/ <text:s text:c="2"/>\</text:p>
            <text:p text:style-name="P39"><text:s text:c="9"/>80 <text:s text:c="3"/>50 <text:s text:c="7"/>← Heap 合法，但 BST 不合法</text:p>
            <text:p text:style-name="P39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4">現實比喻：急診室掛號——不是先來先看診，而是重傷優先。</text:p>
      <text:p text:style-name="P34">Heap 最適合實作 Priority Queue，因為：</text:p>
      <text:list text:continue-numbering="true" text:style-name="WWNum3">
        <text:list-item>
          <text:p text:style-name="P130">取出最大（或最小）值：只需取出 root → O(log n)</text:p>
        </text:list-item>
        <text:list-item>
          <text:p text:style-name="P130">插入新值：放在最後，向上浮（Sift Up）→ O(log n)</text:p>
        </text:list-item>
        <text:list-item>
          <text:p text:style-name="P130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4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42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4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39">⚠️ 偏斜樹（Skewed Tree）的陣列浪費問題</text:p>
            <text:p text:style-name="P38"/>
            <text:p text:style-name="P39">偏斜樹高度 h 時只有 h 個節點，但陣列需要 2^h − 1 個空間。</text:p>
            <text:p text:style-name="P39">例：右偏斜樹 4 層（4 個節點）需要 2^4 − 1 = 15 個陣列空間，浪費了 11 格。</text:p>
            <text:p text:style-name="P39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4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6">題目：</text:p>
            <text:p text:style-name="P36"><text:s text:c="2"/>中序（Inorder）：F B A C E I H J G E（圖片原文：FBAC IH JGE）</text:p>
            <text:p text:style-name="P36"><text:s text:c="2"/>後序（Postorder）：原文最後一個為 E</text:p>
            <text:p text:style-name="P38"/>
            <text:p text:style-name="P36">解題步驟：</text:p>
            <text:p text:style-name="P36">1. 後序最後一個 = E = root</text:p>
            <text:p text:style-name="P36">2. 在中序找 E，E 左邊 = 左子樹，右邊 = 右子樹</text:p>
            <text:p text:style-name="P36">3. 繼續遞迴：後序第二最後 = 右子樹 root，以此類推</text:p>
            <text:p text:style-name="P38"/>
            <text:p text:style-name="P36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4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6">題目：前序=ABCD，後序=DCBA，問共有幾種可能的二元樹？</text:p>
            <text:p text:style-name="P38"/>
            <text:p text:style-name="P36">分析：</text:p>
            <text:p text:style-name="P36">• 前序第一個=A=root，後序最後一個=A ✔</text:p>
            <text:p text:style-name="P36">• 前序第二個=B → B可以是A的左child或右child（兩種）</text:p>
            <text:p text:style-name="P36">• 每個 internal node（A,B,C）各有「貼左或右」2個選擇</text:p>
            <text:p text:style-name="P36">• 共 3 個這樣的節點 → 2³ = 8 種</text:p>
            <text:p text:style-name="P38"/>
            <text:p text:style-name="P36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4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6">題目：證明 Complete Binary Tree 節點數 n 滿足 2^(h-1) ≤ n ≤ 2^h − 1</text:p>
            <text:p text:style-name="P38"/>
            <text:p text:style-name="P36">前 h-1 層全滿：節點數 = 2^(h-1) − 1</text:p>
            <text:p text:style-name="P36">下界：最後層至少 1 個 → n ≥ 2^(h-1) − 1 + 1 = 2^(h-1) <text:s/>✔</text:p>
            <text:p text:style-name="P36">上界：最後層全滿 → n ≤ 2^(h-1) − 1 + 2^(h-1) = 2^h − 1 <text:s/>✔</text:p>
            <text:p text:style-name="P36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4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6">題目：用 1D 陣列存樹，root=a[1], left=a[2i], right=a[2i+1]</text:p>
            <text:p text:style-name="P36"><text:s text:c="6"/>引申：1024 的節點 parent=？ <text:s/>right=？</text:p>
            <text:p text:style-name="P38"/>
            <text:p text:style-name="P36">計算：</text:p>
            <text:p text:style-name="P36">• parent(1024) = ⌊1024/2⌋ = 512</text:p>
            <text:p text:style-name="P38"><text:soft-page-break/><text:span text:style-name="T2">• right(1024) <text:s/>= 2×1024+1 <text:s/>= 2049</text:span></text:p>
            <text:p text:style-name="P38"/>
            <text:p text:style-name="P36">★ 偏斜樹（Skewed Tree）：所有節點只有右 child（或只有左 child）</text:p>
            <text:p text:style-name="P36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4">分支數</text:p>
          </table:table-cell>
          <table:table-cell table:style-name="表格52.B2" office:value-type="string">
            <text:p text:style-name="P32">n − 1</text:p>
          </table:table-cell>
          <table:table-cell table:style-name="表格52.C2" office:value-type="string">
            <text:p text:style-name="P34">n個節點n-1條線</text:p>
          </table:table-cell>
        </table:table-row>
        <table:table-row table:style-name="表格52.1">
          <table:table-cell table:style-name="表格52.A3" office:value-type="string">
            <text:p text:style-name="P34">葉節點數</text:p>
          </table:table-cell>
          <table:table-cell table:style-name="表格52.B2" office:value-type="string">
            <text:p text:style-name="P32">n0 = n2 + 1</text:p>
          </table:table-cell>
          <table:table-cell table:style-name="表格52.C3" office:value-type="string">
            <text:p text:style-name="P34">葉比度2多一個</text:p>
          </table:table-cell>
        </table:table-row>
        <table:table-row table:style-name="表格52.1">
          <table:table-cell table:style-name="表格52.A4" office:value-type="string">
            <text:p text:style-name="P34">滿二元樹節點</text:p>
          </table:table-cell>
          <table:table-cell table:style-name="表格52.B2" office:value-type="string">
            <text:p text:style-name="P32">2^h − 1</text:p>
          </table:table-cell>
          <table:table-cell table:style-name="表格52.C4" office:value-type="string">
            <text:p text:style-name="P34">等比級數求和</text:p>
          </table:table-cell>
        </table:table-row>
        <table:table-row table:style-name="表格52.1">
          <table:table-cell table:style-name="表格52.A5" office:value-type="string">
            <text:p text:style-name="P34">CBT節點範圍</text:p>
          </table:table-cell>
          <table:table-cell table:style-name="表格52.B2" office:value-type="string">
            <text:p text:style-name="P32">2^(h−1) ≤ n ≤ 2^h−1</text:p>
          </table:table-cell>
          <table:table-cell table:style-name="表格52.C5" office:value-type="string">
            <text:p text:style-name="P34">夾住中間</text:p>
          </table:table-cell>
        </table:table-row>
        <table:table-row table:style-name="表格52.1">
          <table:table-cell table:style-name="表格52.A6" office:value-type="string">
            <text:p text:style-name="P34">陣列左子</text:p>
          </table:table-cell>
          <table:table-cell table:style-name="表格52.B2" office:value-type="string">
            <text:p text:style-name="P32">a[2i]</text:p>
          </table:table-cell>
          <table:table-cell table:style-name="表格52.C6" office:value-type="string">
            <text:p text:style-name="P34">乘2</text:p>
          </table:table-cell>
        </table:table-row>
        <table:table-row table:style-name="表格52.1">
          <table:table-cell table:style-name="表格52.A7" office:value-type="string">
            <text:p text:style-name="P34">陣列右子</text:p>
          </table:table-cell>
          <table:table-cell table:style-name="表格52.B2" office:value-type="string">
            <text:p text:style-name="P32">a[2i+1]</text:p>
          </table:table-cell>
          <table:table-cell table:style-name="表格52.C7" office:value-type="string">
            <text:p text:style-name="P34">乘2加1</text:p>
          </table:table-cell>
        </table:table-row>
        <table:table-row table:style-name="表格52.1">
          <table:table-cell table:style-name="表格52.A8" office:value-type="string">
            <text:p text:style-name="P34">陣列父節點</text:p>
          </table:table-cell>
          <table:table-cell table:style-name="表格52.B2" office:value-type="string">
            <text:p text:style-name="P32">a[⌊i/2⌋]</text:p>
          </table:table-cell>
          <table:table-cell table:style-name="表格52.C8" office:value-type="string">
            <text:p text:style-name="P34">除2取整</text:p>
          </table:table-cell>
        </table:table-row>
        <table:table-row table:style-name="表格52.1">
          <table:table-cell table:style-name="表格52.A9" office:value-type="string">
            <text:p text:style-name="P34">BST Inorder</text:p>
          </table:table-cell>
          <table:table-cell table:style-name="表格52.B2" office:value-type="string">
            <text:p text:style-name="P32">遞增排序</text:p>
          </table:table-cell>
          <table:table-cell table:style-name="表格52.C9" office:value-type="string">
            <text:p text:style-name="P34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31">Traversal（走訪）：給樹求前/中/後序 → 記住「根的位置」</text:p>
        </text:list-item>
        <text:list-item>
          <text:p text:style-name="P131">重建樹：給前序+中序 → 前序第一個是根，中序切左右</text:p>
        </text:list-item>
        <text:list-item>
          <text:p text:style-name="P131">前序+後序不唯一 → degree-1 節點每個有2種可能 → 2^k 種</text:p>
        </text:list-item>
        <text:list-item>
          <text:p text:style-name="P131">BST 插入刪除 → 刪除兩個子節點最難，找右子樹最小值補位</text:p>
        </text:list-item>
        <text:list-item>
          <text:p text:style-name="P131">Complete Binary Tree 判斷 → 最後一層要靠左</text:p>
        </text:list-item>
        <text:list-item>
          <text:p text:style-name="P131">陣列表示法 → parent=i/2, left=2i, right=2i+1</text:p>
        </text:list-item>
        <text:list-item>
          <text:p text:style-name="P131">Heap Sort → 建 Max Heap → 依序取出 root → O(n log n)</text:p>
        </text:list-item>
        <text:list-item>
          <text:p text:style-name="P131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2">✅ ChatGPT 的大部分說明都正確，以下補充被省略的細節：</text:p>
            <text:p text:style-name="P38"/>
            <text:p text:style-name="P52">1. n0 = n2 + 1 的公式推導 → ChatGPT 有說到 n0,n2 但沒有完整推導</text:p>
            <text:p text:style-name="P52">2. 前序+後序不唯一的精確說法：有 k 個 degree-1 節點 → 2^k 種可能</text:p>
            <text:p text:style-name="P52"><text:s text:c="3"/>（不是「通常不行」，是「有多少個 degree-1 就有多少倍的不確定性」）</text:p>
            <text:p text:style-name="P52">3. 偏斜樹（Skewed Tree）的概念 → ChatGPT 後期有提到但說明較少</text:p>
            <text:p text:style-name="P52">4. 114 Q1 的 8 種可能 → 來自 3 個 degree-1 節點各有 2 選擇（2^3=8）</text:p>
            <text:p text:style-name="P52">5. Complete Binary Tree 公式推導（115 Q2）→ 上下界各需分開說明</text:p>
            <text:p text:style-name="P52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28</meta:editing-cycles>
    <meta:creation-date>2026-05-28T00:04:25.669000000</meta:creation-date>
    <dc:date>2026-05-29T16:48:43.698000000</dc:date>
    <meta:generator>MODA_ODF_Application_Tools/3.8.4.2$Windows_X86_64 LibreOffice_project/4fb77107d5af14329e08085efe4fa19b5633383a</meta:generator>
    <meta:editing-duration>PT19H22M8S</meta:editing-duration>
    <meta:document-statistic meta:table-count="124" meta:image-count="0" meta:object-count="0" meta:page-count="35" meta:paragraph-count="1076" meta:word-count="11030" meta:character-count="21321" meta:non-whitespace-character-count="15291"/>
  </office:meta>
</office:document-meta>
</file>