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3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6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40" style:family="paragraph" style:parent-style-name="Standard">
      <style:paragraph-properties fo:margin-top="0.088cm" fo:margin-bottom="0.088cm" style:contextual-spacing="false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48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6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64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74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75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7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8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2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86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9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10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0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114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119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120" style:family="paragraph" style:parent-style-name="Standard">
      <style:text-properties officeooo:paragraph-rsid="00529de2"/>
    </style:style>
    <style:style style:name="P121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122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123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12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2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3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38" style:family="paragraph" style:parent-style-name="Standard">
      <style:text-properties officeooo:paragraph-rsid="00549b67"/>
    </style:style>
    <style:style style:name="P139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40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41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42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3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44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5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5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5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5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57" style:family="paragraph" style:parent-style-name="Standard">
      <style:text-properties officeooo:paragraph-rsid="00d1b50e"/>
    </style:style>
    <style:style style:name="P158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5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61" style:family="paragraph" style:parent-style-name="Heading_20_2">
      <style:paragraph-properties fo:margin-top="0.423cm" fo:margin-bottom="0.212cm" style:contextual-spacing="false"/>
    </style:style>
    <style:style style:name="P16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3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64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65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66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8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fo:background-color="#ffd740" style:font-name-asian="Arial3" style:font-size-asian="11pt" style:font-name-complex="Arial3" style:font-size-complex="11pt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8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13" style:family="text">
      <style:text-properties fo:color="#eeff41" loext:opacity="100%" fo:background-color="#f50057" loext:char-shading-value="0"/>
    </style:style>
    <style:style style:name="T1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background-color="#d500f9" loext:char-shading-value="0"/>
    </style:style>
    <style:style style:name="T22" style:family="text">
      <style:text-properties fo:color="#18ffff" loext:opacity="100%" fo:background-color="#1a237e" loext:char-shading-value="0"/>
    </style:style>
    <style:style style:name="T2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27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28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0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d740" loext:char-shading-value="0"/>
    </style:style>
    <style:style style:name="T35" style:family="text">
      <style:text-properties fo:background-color="#ffd740" loext:char-shading-value="0"/>
    </style:style>
    <style:style style:name="T36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7" style:family="text">
      <style:text-properties fo:background-color="#d500f9" loext:char-shading-value="0"/>
    </style:style>
    <style:style style:name="T38" style:family="text">
      <style:text-properties fo:font-weight="bold" fo:background-color="#eeff41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  <style:style style:name="T42" style:family="text">
      <style:text-properties fo:font-weight="bold" fo:background-color="#00e676" loext:char-shading-value="0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2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53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4" style:family="text">
      <style:text-properties fo:background-color="#eeff41" loext:char-shading-value="0"/>
    </style:style>
    <style:style style:name="T55" style:family="text">
      <style:text-properties fo:background-color="#ffc400" loext:char-shading-value="0"/>
    </style:style>
    <style:style style:name="T56" style:family="text">
      <style:text-properties fo:background-color="#64ffda" loext:char-shading-value="0"/>
    </style:style>
    <style:style style:name="T57" style:family="text">
      <style:text-properties fo:background-color="#ff4081" loext:char-shading-value="0"/>
    </style:style>
    <style:style style:name="T58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59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0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1" style:family="text">
      <style:text-properties fo:background-color="#ff5252" loext:char-shading-value="0"/>
    </style:style>
    <style:style style:name="T62" style:family="text">
      <style:text-properties officeooo:rsid="00dcd50c" fo:background-color="#ff5252" loext:char-shading-value="0"/>
    </style:style>
    <style:style style:name="T63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4" style:family="text">
      <style:text-properties fo:background-color="#00e676" loext:char-shading-value="0"/>
    </style:style>
    <style:style style:name="T6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6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67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68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0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71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72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73" style:family="text">
      <style:text-properties fo:background-color="#1a237e" loext:char-shading-value="0"/>
    </style:style>
    <style:style style:name="T74" style:family="text">
      <style:text-properties fo:background-color="#1a237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5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40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6">在學任何公式之前，先把樹的形狀刻進腦子裡。</text:p>
      <text:h text:style-name="P3" text:outline-level="2">1.1 現實生活比喻</text:h>
      <text:p text:style-name="P36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6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7">最頂端的節點，只有一個</text:p>
            <text:p text:style-name="P37">往下連接的節點</text:p>
            <text:p text:style-name="P37">往上連接的節點</text:p>
            <text:p text:style-name="P37">degree = 0，沒有 child 的節點</text:p>
            <text:p text:style-name="P37"><text:span text:style-name="T3">一個節點有幾個 child</text:span>（<text:span text:style-name="T4">二元樹最多 = 2</text:span>）</text:p>
            <text:p text:style-name="P37">連接兩個節點的線；n 個節點 ⇒ n−1 條邊</text:p>
            <text:p text:style-name="P37">degree ≥ 1，還有子節點</text:p>
            <text:p text:style-name="P37">以任意節點為 root 往下看，本身也是一棵樹</text:p>
            <text:p text:style-name="P37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1">⚠️ 重要：樹沒有環（Cycle）！</text:p>
            <text:p text:style-name="P41">若節點 A → B → C → A（繞回去），那就不叫樹，叫圖（Graph）。</text:p>
            <text:p text:style-name="P41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6"><text:span text:style-name="T5">每個節點最多只能有「兩個」子節點</text:span>：<text:span text:style-name="T7">左子節點（left child）</text:span>和<text:span text:style-name="T1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51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65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23"> n 個節點</text:span>的二元樹，共有 <text:span text:style-name="T14">n−1 條邊</text:span></text:p>
            <text:p text:style-name="P40"/>
            <text:p text:style-name="P13">公式2：<text:span text:style-name="T15">葉節點（n0） = 度數為2的節點（n2） + 1</text:span></text:p>
            <text:p text:style-name="P13"><text:s text:c="2"/>→ n0 = n2 + 1 <text:s text:c="2"/>← 圖片原始考試筆記中隱含的超重要公式！</text:p>
            <text:p text:style-name="P40"/>
            <text:p text:style-name="P13">公式3：Full Binary Tree（滿二元樹）最大節點數 = 2^h − 1</text:p>
            <text:p text:style-name="P13"><text:s text:c="2"/>→ 高度 h 時，每層全滿</text:p>
            <text:p text:style-name="P40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73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74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73"/>
      <text:p text:style-name="P76">第一步：先把 degree（度數）看懂</text:p>
      <text:p text:style-name="P88"><text:span text:style-name="T15">degree = 一個節點有幾個小孩（child）</text:span>。二元樹最多 2 個。</text:p>
      <text:p text:style-name="P88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75"><text:soft-page-break/><text:span text:style-name="T27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73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110">定義</text:p>
          </table:table-cell>
          <table:table-cell table:style-name="表格57.B1" office:value-type="string">
            <text:p text:style-name="P89"><text:span text:style-name="T28">n₀ <text:s/>= degree 為 0 的節點數</text:span> <text:s/>→ 葉節點（Leaf）</text:p>
            <text:p text:style-name="P89"><text:span text:style-name="T23">n₁ <text:s/>= degree 為 1 的節點數</text:span> <text:s/>→ 只有一個小孩的節點</text:p>
            <text:p text:style-name="P89"><text:span text:style-name="T14">n₂ <text:s/>= degree 為 2 的節點數</text:span> <text:s/>→ 有兩個小孩的節點</text:p>
          </table:table-cell>
        </table:table-row>
      </table:table>
      <text:p text:style-name="P73"/>
      <text:p text:style-name="P88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2">C 和 D 是葉子</text:span>）</text:p>
            <text:p text:style-name="P27"><text:s text:c="2"/>n₁ = 1 <text:s/>（<text:span text:style-name="T32">B 只有一個小孩</text:span>）</text:p>
            <text:p text:style-name="P27"><text:s text:c="2"/>n₂ = 1 <text:s/>（<text:span text:style-name="T32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73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10">步驟 1</text:p>
          </table:table-cell>
          <table:table-cell table:style-name="表格59.B1" office:value-type="string">
            <text:p text:style-name="P89"><text:span text:style-name="T15">總節點數 = 三種度數節點加起來</text:span>：</text:p>
            <text:p text:style-name="P111">n <text:s/>= <text:s/>n₀ + n₁ + n₂</text:p>
          </table:table-cell>
        </table:table-row>
      </table:table>
      <text:p text:style-name="P73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110">步驟 2</text:p>
          </table:table-cell>
          <table:table-cell table:style-name="表格60.B1" office:value-type="string">
            <text:p text:style-name="P89">從「節點個數」看邊數：</text:p>
            <text:p text:style-name="P74"/>
            <text:p text:style-name="P89">樹有一個性質：<text:span text:style-name="T8">n 個節點，一定有 n−1 條邊</text:span>。</text:p>
            <text:p text:style-name="P89">（因為<text:span text:style-name="T23">每條邊都連著一個被連過來的節點</text:span>，<text:span text:style-name="T16">除了 root 每個人都有一條邊連著自己</text:span>）</text:p>
            <text:p text:style-name="P74"/>
            <text:p text:style-name="P91"><text:s text:c="2"/>▶ <text:span text:style-name="T34">邊數 <text:s/>= <text:s/>n(</text:span><text:span text:style-name="T36">n 個節點</text:span><text:span text:style-name="T34">) − 1 </text:span><text:s text:c="8"/>← 第一個邊數公式</text:p>
          </table:table-cell>
        </table:table-row>
      </table:table>
      <text:p text:style-name="P73"/>
      <text:p text:style-name="P88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73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110">步驟 3</text:p>
          </table:table-cell>
          <table:table-cell table:style-name="表格62.B1" office:value-type="string">
            <text:p text:style-name="P89">從「<text:span text:style-name="T5">每個節點往下伸出幾條線</text:span>」<text:span text:style-name="T9">看邊數</text:span>：</text:p>
            <text:p text:style-name="P74"/>
            <text:p text:style-name="P89">換個角度——<text:span text:style-name="T29">每個節點都可以向下「貢獻」它的子邊</text:span>：</text:p>
            <text:p text:style-name="P89"><text:s text:c="2"/>• degree = 0 的節點（葉子） <text:s text:c="2"/>→ 貢獻 <text:s/>0 <text:s/>條邊</text:p>
            <text:p text:style-name="P89"><text:s text:c="2"/>• degree = 1 的節點 <text:s text:c="10"/>→ 貢獻 <text:s/>1 <text:s/>條邊</text:p>
            <text:p text:style-name="P89"><text:s text:c="2"/>• degree = 2 的節點 <text:s text:c="10"/>→ 貢獻 <text:s/>2 <text:s/>條邊</text:p>
            <text:p text:style-name="P74"/>
            <text:p text:style-name="P89"><text:span text:style-name="T15">把全部節點的貢獻加起來，就是樹的總邊數</text:span>：</text:p>
            <text:p text:style-name="P74"><text:soft-page-break/></text:p>
            <text:p text:style-name="P89"><text:s text:c="2"/>▶ <text:span text:style-name="T8">邊數</text:span> <text:s/>= <text:s/><text:span text:style-name="T8">0</text:span>×n₀ <text:s/>+ <text:s/><text:span text:style-name="T8">1</text:span>×n₁ <text:s/>+ <text:s/><text:span text:style-name="T8">2</text:span>×n₂ <text:s text:c="2"/>← 第二個邊數公式</text:p>
          </table:table-cell>
        </table:table-row>
      </table:table>
      <text:p text:style-name="P73"/>
      <text:p text:style-name="P88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75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75"/>
            <text:p text:style-name="P27"><text:s text:c="2"/>C、D 沒有小孩 <text:s/>→ <text:s/>各貢獻 0 條邊</text:p>
            <text:p text:style-name="P75"/>
            <text:p text:style-name="P27"><text:s text:c="2"/>全部加起來：2 + 1 + 0 + 0 = 3 條邊 <text:s/>= <text:s/>n−1 = 4−1 = 3 <text:s/>✔</text:p>
          </table:table-cell>
        </table:table-row>
      </table:table>
      <text:p text:style-name="P73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10">步驟 4</text:p>
          </table:table-cell>
          <table:table-cell table:style-name="表格64.B1" office:value-type="string">
            <text:p text:style-name="P89">兩個邊數公式算的是同一件事，所以畫等號：</text:p>
            <text:p text:style-name="P113"/>
            <text:p text:style-name="P89"><text:s/><text:span text:style-name="T37"><text:s/></text:span><text:span text:style-name="T15">n − 1 <text:s/>= <text:s/>0×n₀ <text:s/>+ <text:s/>1×n₁ <text:s/>+ <text:s/>2×n₂</text:span></text:p>
            <text:p text:style-name="P74"/>
            <text:p text:style-name="P89">把 n = n₀ + n₁ + n₂ 代入左邊：</text:p>
            <text:p text:style-name="P74"/>
            <text:p text:style-name="P89"><text:s text:c="2"/>n₀ + n₁ + n₂ − 1 <text:s/>= <text:s/>n₁ + 2n₂</text:p>
          </table:table-cell>
        </table:table-row>
      </table:table>
      <text:p text:style-name="P73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10">步驟 5</text:p>
          </table:table-cell>
          <table:table-cell table:style-name="表格65.B1" office:value-type="string">
            <text:p text:style-name="P89">整理數學式（兩邊同時消去 n₁）：</text:p>
            <text:p text:style-name="P74"/>
            <text:p text:style-name="P89"><text:s text:c="2"/>n₀ + n₁ + n₂ − 1 <text:s/>= <text:s/>n₁ + 2n₂</text:p>
            <text:p text:style-name="P89"><text:s text:c="2"/>↓ <text:s/>兩邊減去 n₁</text:p>
            <text:p text:style-name="P89"><text:s text:c="2"/>n₀ + n₂ − 1 <text:s/>= <text:s/>2n₂</text:p>
            <text:p text:style-name="P89"><text:s text:c="2"/>↓ <text:s/>移項</text:p>
            <text:p text:style-name="P89"><text:s text:c="2"/>n₀ <text:s/>= <text:s/>2n₂ − n₂ + 1 <text:s/>= <text:s/>n₂ + 1</text:p>
            <text:p text:style-name="P74"/>
            <text:p text:style-name="P89"><text:s text:c="2"/>▶ <text:s/>n₀ = n₂ + 1 <text:s text:c="3"/>✔ 得證！</text:p>
          </table:table-cell>
        </table:table-row>
      </table:table>
      <text:p text:style-name="P73"/>
      <text:p text:style-name="P76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90"><text:span text:style-name="T38">n₀ = 葉節點數</text:span>；<text:span text:style-name="T39">n₁ = degree-1 節點數</text:span>；<text:span text:style-name="T4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114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90"><text:span text:style-name="T17">邊數 = n − 1</text:span>（<text:span text:style-name="T1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9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9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90">消去 n₁ 後移項：<text:span text:style-name="T15">n₀ = n₂ + 1</text:span> <text:s/>✔</text:p>
          </table:table-cell>
        </table:table-row>
      </table:table>
      <text:p text:style-name="P73"/>
      <text:p text:style-name="P76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8">題型：某二元樹<text:span text:style-name="T32">有 20 個 degree=2 的節點</text:span>，請問<text:span text:style-name="T34">有幾個葉節點</text:span>？</text:p>
            <text:p text:style-name="P74"/>
            <text:p text:style-name="P58"><text:s text:c="2"/>直接套公式：n₀ = n₂ + 1 = 20 + 1 = 21 個</text:p>
            <text:p text:style-name="P74"/>
            <text:p text:style-name="P58">反過來也可以：若已知葉節點 15 個，則 degree=2 的節點有 15 − 1 = 14 個</text:p>
          </table:table-cell>
        </table:table-row>
      </table:table>
      <text:p text:style-name="P73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2">⚠️ <text:span text:style-name="T9">此公式僅適用於 Binary Tree（二元樹）！</text:span></text:p>
            <text:p text:style-name="P74"/>
            <text:p text:style-name="P42">因為二元樹的 degree 最多為 2，只有 n₀、n₁、n₂ 三種情況。</text:p>
            <text:p text:style-name="P42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21">2^h − 1</text:span>）</text:h>
      <text:p text:style-name="P36"><text:span text:style-name="T23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5">2^h − 1 </text:span><text:span text:style-name="T10">(Full Binary Tree（滿二元樹）</text:span><text:span text:style-name="T44">最大節點數 = 2^h − 1</text:span><text:span text:style-name="T10"> → </text:span><text:span text:style-name="T45">高度 h 時，每層全滿</text:span><text:span text:style-name="T10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1">⚠️ 高度定義有兩種，考試務必看清楚題目！</text:p>
            <text:p text:style-name="P40"/>
            <text:p text:style-name="P41"><text:span text:style-name="T39">定義一：root 算第 1 層</text:span> → 只有 root 的樹，高度 = 1</text:p>
            <text:p text:style-name="P41"><text:span text:style-name="T39">定義二：root 算第 0 層</text:span> → 只有 root 的樹，高度 = 0</text:p>
            <text:p text:style-name="P40"/>
            <text:p text:style-name="P41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3">左子樹的所有值 &lt; 根節點值 &lt; 右子樹的所有值</text:p>
            <text:p text:style-name="P59">（<text:span text:style-name="T15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6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7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7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7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46">找右子樹最小值（60）來取代 50</text:span></text:p>
            <text:p text:style-name="P26">方法二：<text:span text:style-name="T47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7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92"><text:span text:style-name="T9">BST 搜尋快的前提是「每次比較都能砍掉一半」</text:span>，<text:span text:style-name="T15">但這個前提要求樹夠平均</text:span>。若<text:span text:style-name="T23">插入順序不佳，樹會退化成直線</text:span>。</text:p>
      <text:p text:style-name="P118"/>
      <text:p text:style-name="P78">退化的三種情況</text:p>
      <text:p text:style-name="P50">① 遞增插入 → 右偏斜樹</text:p>
      <text:p text:style-name="P92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2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118"/>
      <text:p text:style-name="P50">② 遞減插入 → 左偏斜樹</text:p>
      <text:p text:style-name="P92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118"/>
      <text:p text:style-name="P50">③ 鋸齒插入 → 看起來平衡，其實歪了</text:p>
      <text:p text:style-name="P92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119"><text:soft-page-break/><text:span text:style-name="T27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118"/>
      <text:p text:style-name="P78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2">正常</text:span> BST（平衡）</text:p>
          </table:table-cell>
          <table:table-cell table:style-name="表格69.A1" office:value-type="string">
            <text:p text:style-name="P19"><text:span text:style-name="T34">退化</text:span> BST</text:p>
          </table:table-cell>
        </table:table-row>
        <table:table-row table:style-name="表格69.1">
          <table:table-cell table:style-name="表格69.A2" office:value-type="string">
            <text:p text:style-name="P92">搜尋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3" office:value-type="string">
            <text:p text:style-name="P92">插入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4" office:value-type="string">
            <text:p text:style-name="P92">刪除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</table:table>
      <text:p text:style-name="P118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5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118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3"><text:span text:style-name="T39">偏斜樹</text:span> = <text:span text:style-name="T9">所有節點只有左子節點，或只有右子節點</text:span></text:p>
            <text:p text:style-name="P43">→ <text:span text:style-name="T23">形狀等同 Linked List</text:span></text:p>
            <text:p text:style-name="P43">→ 高度 h 時只有 h 個節點（最少）</text:p>
          </table:table-cell>
        </table:table-row>
      </table:table>
      <text:p text:style-name="P118"/>
      <text:p text:style-name="P92">如果<text:span text:style-name="T49">用陣列儲存</text:span><text:span text:style-name="T41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38">2×1+1</text:span> = 3）</text:p>
            <text:p text:style-name="P29">節點3 在 index=7 <text:s/>（3 的右子 = <text:span text:style-name="T38">2×3+1</text:span> = 7）</text:p>
            <text:p text:style-name="P29">節點4 在 index=15 （7 的右子 = <text:span text:style-name="T38">2×7+1</text:span> = 15）</text:p>
            <text:p text:style-name="P29">節點5 在 index=31 （15的右子 = <text:span text:style-name="T38">2×15+1</text:span> = 31）</text:p>
            <text:p text:style-name="P119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119"/>
            <text:p text:style-name="P29"><text:span text:style-name="T48">5 個節點，卻佔用 2^5 - 1 = 31 格</text:span>，<text:span text:style-name="T29">浪費 26 格！</text:span></text:p>
          </table:table-cell>
        </table:table-row>
      </table:table>
      <text:p text:style-name="P118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92">3</text:p>
          </table:table-cell>
          <table:table-cell table:style-name="表格73.B2" office:value-type="string">
            <text:p text:style-name="P92">7</text:p>
          </table:table-cell>
          <table:table-cell table:style-name="表格73.C2" office:value-type="string">
            <text:p text:style-name="P70">4</text:p>
          </table:table-cell>
          <table:table-cell table:style-name="表格73.C2" office:value-type="string">
            <text:p text:style-name="P71">43%</text:p>
          </table:table-cell>
        </table:table-row>
        <table:table-row table:style-name="表格73.1">
          <table:table-cell table:style-name="表格73.A3" office:value-type="string">
            <text:p text:style-name="P92">5</text:p>
          </table:table-cell>
          <table:table-cell table:style-name="表格73.B3" office:value-type="string">
            <text:p text:style-name="P92">31</text:p>
          </table:table-cell>
          <table:table-cell table:style-name="表格73.C2" office:value-type="string">
            <text:p text:style-name="P70">26</text:p>
          </table:table-cell>
          <table:table-cell table:style-name="表格73.C2" office:value-type="string">
            <text:p text:style-name="P71">16%</text:p>
          </table:table-cell>
        </table:table-row>
        <table:table-row table:style-name="表格73.1">
          <table:table-cell table:style-name="表格73.A4" office:value-type="string">
            <text:p text:style-name="P92">10</text:p>
          </table:table-cell>
          <table:table-cell table:style-name="表格73.B4" office:value-type="string">
            <text:p text:style-name="P92">1,023</text:p>
          </table:table-cell>
          <table:table-cell table:style-name="表格73.C2" office:value-type="string">
            <text:p text:style-name="P70">1,013</text:p>
          </table:table-cell>
          <table:table-cell table:style-name="表格73.C2" office:value-type="string">
            <text:p text:style-name="P71">&lt; 1%</text:p>
          </table:table-cell>
        </table:table-row>
      </table:table>
      <text:p text:style-name="P118"/>
      <text:h text:style-name="P5" text:outline-level="2">3.6　<text:span text:style-name="T34">解決方法：平衡樹</text:span></text:h>
      <text:p text:style-name="P92"><text:span text:style-name="T15">只要讓樹「自動保持平衡」</text:span>，<text:span text:style-name="T9">就能確保搜尋永遠是 O(log n)</text:span>。</text:p>
      <text:p text:style-name="P118"/>
      <text:p text:style-name="P78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3"><text:span text:style-name="T33">強制規定</text:span>：<text:span text:style-name="T20">任何節點的左右子樹高度差 ≤ 1</text:span></text:p>
            <text:p text:style-name="P83">違反時立即「旋轉」調整</text:p>
          </table:table-cell>
        </table:table-row>
      </table:table>
      <text:p text:style-name="P92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66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120"/>
          </table:table-cell>
          <table:table-cell table:style-name="表格75.B1" office:value-type="string">
            <text:p text:style-name="P52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120"/>
          </table:table-cell>
        </table:table-row>
      </table:table>
      <text:p text:style-name="P118"/>
      <text:p text:style-name="P92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<text:span text:style-name="T35">LL</text:span> 旋轉</text:p>
          </table:table-cell>
          <table:table-cell table:style-name="表格78.B2" office:value-type="string">
            <text:p text:style-name="P169">新節點在左子樹的左邊</text:p>
          </table:table-cell>
          <table:table-cell table:style-name="表格78.C2" office:value-type="string">
            <text:p text:style-name="P92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<text:span text:style-name="T35">RR</text:span> 旋轉</text:p>
          </table:table-cell>
          <table:table-cell table:style-name="表格78.B3" office:value-type="string">
            <text:p text:style-name="P169">新節點在右子樹的右邊</text:p>
          </table:table-cell>
          <table:table-cell table:style-name="表格78.C3" office:value-type="string">
            <text:p text:style-name="P92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<text:span text:style-name="T35">LR</text:span> 旋轉</text:p>
          </table:table-cell>
          <table:table-cell table:style-name="表格78.B4" office:value-type="string">
            <text:p text:style-name="P169">新節點在左子樹的右邊</text:p>
          </table:table-cell>
          <table:table-cell table:style-name="表格78.C4" office:value-type="string">
            <text:p text:style-name="P92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<text:span text:style-name="T35">RL</text:span> 旋轉</text:p>
          </table:table-cell>
          <table:table-cell table:style-name="表格78.B5" office:value-type="string">
            <text:p text:style-name="P169">新節點在右子樹的左邊</text:p>
          </table:table-cell>
          <table:table-cell table:style-name="表格78.C5" office:value-type="string">
            <text:p text:style-name="P92">先右旋再左旋（兩次）</text:p>
          </table:table-cell>
        </table:table-row>
      </table:table>
      <text:p text:style-name="P118"/>
      <text:p text:style-name="P78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4">規則比 AVL Tree 寬鬆，不要求嚴格平衡，旋轉次數更少</text:p>
            <text:p text:style-name="P124">平均效能比 AVL Tree 更穩定，適合頻繁插入刪除的場景</text:p>
            <text:p text:style-name="P121"/>
            <text:p text:style-name="P124">實際應用：</text:p>
            <text:p text:style-name="P124"><text:s text:c="2"/>✔ C++ STL 的 std::map、std::set</text:p>
            <text:p text:style-name="P124"><text:s text:c="2"/>✔ Java 的 TreeMap、TreeSet</text:p>
            <text:p text:style-name="P124"><text:s text:c="2"/>✔ Linux 核心的行程排程器</text:p>
          </table:table-cell>
        </table:table-row>
      </table:table>
      <text:p text:style-name="P118"><text:soft-page-break/></text:p>
      <text:p text:style-name="P78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3">每個節點可以有很多 key（不只 2 個）</text:p>
            <text:p text:style-name="P83">專為磁碟讀取最佳化：一次讀一個節點 = 一次磁碟 I/O</text:p>
            <text:p text:style-name="P121"/>
            <text:p text:style-name="P83">實際應用：</text:p>
            <text:p text:style-name="P83"><text:s text:c="2"/>✔ MySQL、PostgreSQL 的索引（Index）</text:p>
            <text:p text:style-name="P83"><text:s text:c="2"/>✔ 檔案系統（NTFS、ext4）</text:p>
          </table:table-cell>
        </table:table-row>
      </table:table>
      <text:p text:style-name="P118"/>
      <text:p text:style-name="P78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122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92">最嚴格</text:p>
          </table:table-cell>
          <table:table-cell table:style-name="表格81.C2" office:value-type="string">
            <text:p text:style-name="P92">較寬鬆</text:p>
          </table:table-cell>
          <table:table-cell table:style-name="表格81.D2" office:value-type="string">
            <text:p text:style-name="P92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92">最快</text:p>
          </table:table-cell>
          <table:table-cell table:style-name="表格81.C3" office:value-type="string">
            <text:p text:style-name="P92">略慢</text:p>
          </table:table-cell>
          <table:table-cell table:style-name="表格81.D3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92">較慢（旋轉多）</text:p>
          </table:table-cell>
          <table:table-cell table:style-name="表格81.C4" office:value-type="string">
            <text:p text:style-name="P92">較快</text:p>
          </table:table-cell>
          <table:table-cell table:style-name="表格81.D4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92">記憶體搜尋</text:p>
          </table:table-cell>
          <table:table-cell table:style-name="表格81.C5" office:value-type="string">
            <text:p text:style-name="P92">STL / Java</text:p>
          </table:table-cell>
          <table:table-cell table:style-name="表格81.D5" office:value-type="string">
            <text:p text:style-name="P92">資料庫索引</text:p>
          </table:table-cell>
        </table:table-row>
      </table:table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123"/>
      <text:p text:style-name="P123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4">先搞清楚：AVL Tree 和 Red-Black Tree 是二元樹（每節點最多 2 個小孩）</text:p>
            <text:p text:style-name="P44">但 B-Tree 不是二元樹！每個節點可以有很多小孩，是「多元樹（M-ary Tree）」</text:p>
          </table:table-cell>
        </table:table-row>
      </table:table>
      <text:p text:style-name="P136"/>
      <text:p text:style-name="P138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<text:span text:style-name="T39">AVL Tree</text:span> = <text:span text:style-name="T5">自動保持平衡</text:span>的 <text:span text:style-name="T23">BST（Binary Search Tree）</text:span></text:p>
            <text:p text:style-name="P84">✔<text:span text:style-name="T50"> 是二元樹</text:span>（每節點最多 2 個 child）</text:p>
            <text:p text:style-name="P84">✔ 同時也是 <text:span text:style-name="T15">BST（左 &lt; 根 &lt; 右）</text:span></text:p>
            <text:p text:style-name="P84">✔ 額外保證：<text:span text:style-name="T24">任何節點的「平衡因子」絕對值 </text:span><text:span text:style-name="T6">≤ 1</text:span></text:p>
          </table:table-cell>
        </table:table-row>
      </table:table>
      <text:p text:style-name="P136"/>
      <text:h text:style-name="P6" text:outline-level="2">AVL-1　平衡因子（Balance Factor）</text:h>
      <text:p text:style-name="P93"><text:span text:style-name="T34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4">平衡因子（BF）= 左子樹高度 − 右子樹高度</text:p>
            <text:p text:style-name="P139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115">BF ≥ 2 或 ≤ -2 <text:s/>→ 失衡！必須旋轉修復</text:p>
          </table:table-cell>
        </table:table-row>
      </table:table>
      <text:p text:style-name="P136"/>
      <text:p text:style-name="P93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36"/>
      <text:h text:style-name="P6" text:outline-level="2">AVL-2　四種旋轉（超重要，考試必考）</text:h>
      <text:p text:style-name="P93"><text:span text:style-name="T53">只要插入或刪除後有節點的 BF 超出範圍</text:span>，<text:span text:style-name="T39">就立刻旋轉修復</text:span>。共有 4 種情況：</text:p>
      <text:p text:style-name="P136"/>
      <text:p text:style-name="P79">旋轉一：LL 旋轉（新節點插入在<text:span text:style-name="T34">失衡節點左子樹</text:span>的左邊）</text:p>
      <text:p text:style-name="P93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67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4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38"/>
          </table:table-cell>
          <table:table-cell table:style-name="表格87.B1" office:value-type="string">
            <text:p text:style-name="P53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二：RR 旋轉（新節點插入在<text:span text:style-name="T34">失衡節點右子樹</text:span>的右邊）</text:p>
      <text:p text:style-name="P93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67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4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38"/>
          </table:table-cell>
          <table:table-cell table:style-name="表格90.B1" office:value-type="string">
            <text:p text:style-name="P53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三：<text:span text:style-name="T34">LR </text:span>旋轉（新節點插入在<text:span text:style-name="T34">失衡節點左子樹</text:span>的右邊）</text:p>
      <text:p text:style-name="P93">解法：<text:span text:style-name="T15">先對左子節點做左旋</text:span>，<text:span text:style-name="T9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2">左旋</text:span> 20： <text:s text:c="5"/>第二步：<text:span text:style-name="T42">右旋</text:span> 30：</text:p>
            <text:p text:style-name="P30"><text:s text:c="4"/>30 (BF=2) <text:s text:c="16"/>30 (BF=2) <text:s text:c="13"/><text:span text:style-name="T39">25</text:span> (BF=0)</text:p>
            <text:p text:style-name="P30"><text:s text:c="3"/>/ <text:s text:c="24"/>/ <text:s text:c="21"/>/ <text:s/>\</text:p>
            <text:p text:style-name="P30"><text:s text:c="2"/><text:span text:style-name="T54">20</text:span> (BF=-1) <text:s text:c="14"/><text:span text:style-name="T39">25</text:span> (BF=1) <text:s text:c="11"/>20 <text:s text:c="4"/><text:span text:style-name="T39">30</text:span></text:p>
            <text:p text:style-name="P30"><text:s text:c="4"/>\ <text:s text:c="21"/>/</text:p>
            <text:p text:style-name="P30"><text:s text:c="4"/>25 <text:s/>← 新節點 <text:s text:c="8"/><text:span text:style-name="T39">20</text:span></text:p>
          </table:table-cell>
        </table:table-row>
      </table:table>
      <text:p text:style-name="P136"/>
      <text:p text:style-name="P79">旋轉四：<text:span text:style-name="T34">RL</text:span> 旋轉（新節點插入在<text:span text:style-name="T34">失衡節點右子樹</text:span>的左邊）</text:p>
      <text:p text:style-name="P93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36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86">LL 旋轉</text:p>
          </table:table-cell>
          <table:table-cell table:style-name="表格95.B2" office:value-type="string">
            <text:p text:style-name="P93"><text:span text:style-name="T32">BF ≥ 2</text:span>（<text:span text:style-name="T34">左重</text:span>）</text:p>
          </table:table-cell>
          <table:table-cell table:style-name="表格95.C2" office:value-type="string">
            <text:p text:style-name="P101">左子樹的左邊</text:p>
          </table:table-cell>
          <table:table-cell table:style-name="表格95.D2" office:value-type="string">
            <text:p text:style-name="P93">右旋一次</text:p>
          </table:table-cell>
        </table:table-row>
        <table:table-row table:style-name="表格95.1">
          <table:table-cell table:style-name="表格95.A3" office:value-type="string">
            <text:p text:style-name="P86">RR 旋轉</text:p>
          </table:table-cell>
          <table:table-cell table:style-name="表格95.B3" office:value-type="string">
            <text:p text:style-name="P93"><text:span text:style-name="T32">BF ≤ -2</text:span>（<text:span text:style-name="T55">右重</text:span>）</text:p>
          </table:table-cell>
          <table:table-cell table:style-name="表格95.C3" office:value-type="string">
            <text:p text:style-name="P101">右子樹的右邊</text:p>
          </table:table-cell>
          <table:table-cell table:style-name="表格95.D3" office:value-type="string">
            <text:p text:style-name="P93">左旋一次</text:p>
          </table:table-cell>
        </table:table-row>
        <table:table-row table:style-name="表格95.1">
          <table:table-cell table:style-name="表格95.A4" office:value-type="string">
            <text:p text:style-name="P86">LR 旋轉</text:p>
          </table:table-cell>
          <table:table-cell table:style-name="表格95.B4" office:value-type="string">
            <text:p text:style-name="P93"><text:span text:style-name="T56">BF ≥ 2</text:span>（<text:span text:style-name="T57">左重</text:span>）</text:p>
          </table:table-cell>
          <table:table-cell table:style-name="表格95.C4" office:value-type="string">
            <text:p text:style-name="P104">左子樹的右邊</text:p>
          </table:table-cell>
          <table:table-cell table:style-name="表格95.D4" office:value-type="string">
            <text:p text:style-name="P93">先左旋再右旋</text:p>
          </table:table-cell>
        </table:table-row>
        <table:table-row table:style-name="表格95.1">
          <table:table-cell table:style-name="表格95.A5" office:value-type="string">
            <text:p text:style-name="P86">RL 旋轉</text:p>
          </table:table-cell>
          <table:table-cell table:style-name="表格95.B5" office:value-type="string">
            <text:p text:style-name="P93"><text:span text:style-name="T56">BF ≤ -2</text:span>（<text:span text:style-name="T57">右重</text:span>）</text:p>
          </table:table-cell>
          <table:table-cell table:style-name="表格95.C5" office:value-type="string">
            <text:p text:style-name="P104">右子樹的左邊</text:p>
          </table:table-cell>
          <table:table-cell table:style-name="表格95.D5" office:value-type="string">
            <text:p text:style-name="P93">先右旋再左旋</text:p>
          </table:table-cell>
        </table:table-row>
      </table:table>
      <text:p text:style-name="P136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61">AVL Tree <text:span text:style-name="T15">高度永遠維持在 O(log n)</text:span></text:p>
            <text:p text:style-name="P139"><text:soft-page-break/><text:span text:style-name="T58">搜尋：O(log n) <text:s text:c="2"/>插入：O(log n) <text:s text:c="2"/>刪除：O(log n)</text:span></text:p>
            <text:p text:style-name="P139"/>
            <text:p text:style-name="P61">代價：<text:span text:style-name="T29">每次插入/刪除後都要「往上回頭檢查每個節點的 BF」</text:span>，可能旋轉多次</text:p>
            <text:p text:style-name="P61">→ 如果需要大量插入刪除，Red-Black Tree 可能更適合</text:p>
          </table:table-cell>
        </table:table-row>
      </table:table>
      <text:p text:style-name="P138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5">Red-Black Tree（紅黑樹）= <text:span text:style-name="T32">每個節點標記「紅色或黑色」</text:span>的<text:span text:style-name="T23">自平衡 BST</text:span></text:p>
            <text:p text:style-name="P125">✔ <text:span text:style-name="T50">是二元樹</text:span>（每節點最多 2 個 child）</text:p>
            <text:p text:style-name="P125">✔ 同時也是 <text:span text:style-name="T15">BST（左 &lt; 根 &lt; 右）</text:span></text:p>
            <text:p text:style-name="P125">✔ <text:span text:style-name="T40">用</text:span><text:span text:style-name="T25">顏色</text:span><text:span text:style-name="T40">規則</text:span><text:span text:style-name="T25">取代</text:span><text:span text:style-name="T40">嚴格的高度差限制</text:span>，效能更穩定</text:p>
          </table:table-cell>
        </table:table-row>
      </table:table>
      <text:p text:style-name="P136"/>
      <text:h text:style-name="P6" text:outline-level="2">RBT-1　五條規則（缺一不可）</text:h>
      <text:p text:style-name="P93">每棵 Red-Black Tree 必須同時滿足以下五條：</text:p>
      <text:p text:style-name="P13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29">規則1</text:p>
          </table:table-cell>
          <table:table-cell table:style-name="表格98.B1" office:value-type="string">
            <text:p text:style-name="P93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29">規則2</text:p>
          </table:table-cell>
          <table:table-cell table:style-name="表格98.B2" office:value-type="string">
            <text:p text:style-name="P147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29">規則3</text:p>
          </table:table-cell>
          <table:table-cell table:style-name="表格98.B3" office:value-type="string">
            <text:p text:style-name="P15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29">規則4</text:p>
          </table:table-cell>
          <table:table-cell table:style-name="表格98.B4" office:value-type="string">
            <text:p text:style-name="P93">紅色節點的小孩一定是黑色（<text:span text:style-name="T23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29">規則5</text:p>
          </table:table-cell>
          <table:table-cell table:style-name="表格98.B5" office:value-type="string">
            <text:p text:style-name="P93">從<text:span text:style-name="T39">任意節點到</text:span><text:span text:style-name="T59">其</text:span><text:span text:style-name="T18">所有</text:span><text:span text:style-name="T59">葉節點</text:span><text:span text:style-name="T39">的路徑</text:span>，<text:span text:style-name="T50">黑色節點數量相同</text:span>（<text:span text:style-name="T24">黑高度相同</text:span>）</text:p>
          </table:table-cell>
        </table:table-row>
      </table:table>
      <text:p text:style-name="P136"/>
      <text:h text:style-name="P8" text:outline-level="2">RBT-2　視覺化說明（含 NIL 節點完整版）</text:h>
      <text:p text:style-name="P15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5">⚠️ 超重要陷阱：<text:span text:style-name="T18">Red-Black Tree 的「葉節點」和 Binary Tree 的「葉節點」</text:span><text:span text:style-name="T30">不同！</text:span></text:p>
            <text:p text:style-name="P153"/>
            <text:p text:style-name="P148">Binary Tree 的葉節點 = 沒有小孩的實際資料節點（如 3、7、30）</text:p>
            <text:p text:style-name="P116">Red-Black Tree 的葉節點 = NIL（NULL）節點</text:p>
            <text:p text:style-name="P45"><text:s text:c="26"/>↑ 也就是<text:span text:style-name="T51">每個實際節點下面「空的位置」</text:span></text:p>
            <text:p text:style-name="P153"/>
            <text:p text:style-name="P45">規則3<text:span text:style-name="T9">「所有葉節點都是黑色」真正的意思是</text:span>：<text:span text:style-name="T50">所有 NIL 都是黑色</text:span></text:p>
            <text:p text:style-name="P45">不是說「所有沒有小孩的實際資料節點都必須是黑色」！</text:p>
          </table:table-cell>
        </table:table-row>
      </table:table>
      <text:p text:style-name="P152"/>
      <text:p text:style-name="P80">省略版（教科書常見畫法，<text:span text:style-name="T21">NIL 不畫出來</text:span>）</text:p>
      <text:p text:style-name="P99">一般教材<text:span text:style-name="T32">為了簡潔</text:span>，<text:span text:style-name="T50">把 NIL 節點全部省略</text:span>，<text:span text:style-name="T32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54"><text:soft-page-break/></text:p>
            <text:p text:style-name="P31">← <text:span text:style-name="T32">這棵樹看起來 30(R) 是葉子</text:span>，<text:span text:style-name="T60">卻是紅色</text:span>，<text:span text:style-name="T50">初學者會以為違規！</text:span></text:p>
            <text:p text:style-name="P31"><text:s text:c="3"/>但<text:span text:style-name="T15">其實 30 下面還有兩個 NIL(B)</text:span>，所以規則3仍然成立。</text:p>
          </table:table-cell>
        </table:table-row>
      </table:table>
      <text:p text:style-name="P152"/>
      <text:p text:style-name="P80">完整版（含所有 NIL 節點）</text:p>
      <text:p text:style-name="P99"><text:span text:style-name="T15">把所有 NIL 節點畫出來</text:span>，<text:span text:style-name="T8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2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2">NIL</text:span> <text:span text:style-name="T32">NIL</text:span> <text:span text:style-name="T32">NIL</text:span> <text:span text:style-name="T32">NIL</text:span> <text:s text:c="4"/><text:span text:style-name="T32">NIL</text:span> <text:s text:c="2"/><text:span text:style-name="T32">NIL</text:span></text:p>
            <text:p text:style-name="P31"><text:s text:c="8"/><text:span text:style-name="T32">(B)</text:span> <text:span text:style-name="T32">(B)</text:span> <text:span text:style-name="T32">(B)</text:span> <text:span text:style-name="T32">(B)</text:span> <text:s text:c="4"/><text:span text:style-name="T32">(B)</text:span> <text:s text:c="2"/><text:span text:style-name="T32">(B)</text:span></text:p>
            <text:p text:style-name="P154"/>
            <text:p text:style-name="P31">← <text:span text:style-name="T11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52"/>
      <text:p text:style-name="P80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30">規則</text:p>
          </table:table-cell>
          <table:table-cell table:style-name="表格115.A1" office:value-type="string">
            <text:p text:style-name="P130">結果</text:p>
          </table:table-cell>
          <table:table-cell table:style-name="表格115.A1" office:value-type="string">
            <text:p text:style-name="P130">說明</text:p>
          </table:table-cell>
        </table:table-row>
        <table:table-row table:style-name="表格115.1">
          <table:table-cell table:style-name="表格115.A2" office:value-type="string">
            <text:p text:style-name="P131">規則1</text:p>
          </table:table-cell>
          <table:table-cell table:style-name="表格115.B2" office:value-type="string">
            <text:p text:style-name="P54">✅ 成立</text:p>
          </table:table-cell>
          <table:table-cell table:style-name="表格115.C2" office:value-type="string">
            <text:p text:style-name="P99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31">規則2</text:p>
          </table:table-cell>
          <table:table-cell table:style-name="表格115.B2" office:value-type="string">
            <text:p text:style-name="P54">✅ 成立</text:p>
          </table:table-cell>
          <table:table-cell table:style-name="表格115.C3" office:value-type="string">
            <text:p text:style-name="P102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31">規則3</text:p>
          </table:table-cell>
          <table:table-cell table:style-name="表格115.B2" office:value-type="string">
            <text:p text:style-name="P54">✅ 成立</text:p>
          </table:table-cell>
          <table:table-cell table:style-name="表格115.C4" office:value-type="string">
            <text:p text:style-name="P99"><text:span text:style-name="T32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31">規則4</text:p>
          </table:table-cell>
          <table:table-cell table:style-name="表格115.B2" office:value-type="string">
            <text:p text:style-name="P54">✅ 成立</text:p>
          </table:table-cell>
          <table:table-cell table:style-name="表格115.C5" office:value-type="string">
            <text:p text:style-name="P99">R:5 的小孩是 B:3 和 B:7（黑）；<text:span text:style-name="T56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31">規則5</text:p>
          </table:table-cell>
          <table:table-cell table:style-name="表格115.B2" office:value-type="string">
            <text:p text:style-name="P54">✅ 成立</text:p>
          </table:table-cell>
          <table:table-cell table:style-name="表格115.C6" office:value-type="string">
            <text:p text:style-name="P99">見下方黑高計算</text:p>
          </table:table-cell>
        </table:table-row>
      </table:table>
      <text:p text:style-name="P152"/>
      <text:p text:style-name="P80">規則5 詳細計算（黑高度一致性）</text:p>
      <text:p text:style-name="P99">每條從 root 到 NIL 的路徑，計算黑色節點數（<text:span text:style-name="T32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54"/>
            <text:p text:style-name="P31">【算 NIL 的版本（教科書正式版）】</text:p>
            <text:p text:style-name="P154"><text:soft-page-break/><text:span text:style-name="T27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5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7">📌 考試應對方式：</text:p>
            <text:p text:style-name="P153"/>
            <text:p text:style-name="P127">看到「葉節點都是黑色」→ 腦中自動翻譯成「所有 NIL 都是黑色」</text:p>
            <text:p text:style-name="P153"/>
            <text:p text:style-name="P135">看到 30(R) 是「葉子」卻是紅色 → 不要以為違規！</text:p>
            <text:p text:style-name="P127"><text:s text:c="2"/><text:span text:style-name="T9">30(R) 的正式葉節點是它下面的兩個 NIL(B)</text:span>，規則3 仍然成立。</text:p>
            <text:p text:style-name="P153"/>
            <text:p text:style-name="P127">計算黑高時：含 NIL 或不含 NIL 都可以，只要整棵樹算法一致即可。</text:p>
          </table:table-cell>
        </table:table-row>
      </table:table>
      <text:p text:style-name="P152"/>
      <text:h text:style-name="P7" text:outline-level="2">RBT-3　為什麼「顏色」能保持平衡？</text:h>
      <text:p text:style-name="P94"><text:span text:style-name="T23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6">因為紅色節點不能連續出現（規則4），</text:p>
            <text:p text:style-name="P126">最長的路徑（紅黑交替）最多是最短路徑（全黑）的 2 倍。</text:p>
            <text:p text:style-name="P140"/>
            <text:p text:style-name="P126">因此 Red-Black Tree 的高度保證在 2 × log₂(n+1) 以內</text:p>
            <text:p text:style-name="P126">→ 搜尋、插入、刪除仍然是 O(log n)</text:p>
          </table:table-cell>
        </table:table-row>
      </table:table>
      <text:p text:style-name="P137"/>
      <text:h text:style-name="P6" text:outline-level="2">RBT-4　插入後如何修復？</text:h>
      <text:p text:style-name="P81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68">如果塗黑色</text:p>
            <text:p text:style-name="P149">一定增加某條路徑的黑高</text:p>
            <text:p text:style-name="P100">違反規則5（黑高一致）</text:p>
            <text:p text:style-name="P100">→ 黑高不一致極難修復</text:p>
          </table:table-cell>
          <table:table-cell table:style-name="表格101.B1" office:value-type="string">
            <text:p text:style-name="P55">如果塗紅色 ✔</text:p>
            <text:p text:style-name="P151">黑高完全不變</text:p>
            <text:p text:style-name="P100"><text:span text:style-name="T32">只可能</text:span><text:span text:style-name="T23">違反規則4（紅紅相鄰）</text:span></text:p>
            <text:p text:style-name="P100">→ 只要<text:span text:style-name="T51">看爸爸是不是紅色即可</text:span></text:p>
          </table:table-cell>
        </table:table-row>
      </table:table>
      <text:p text:style-name="P15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28">因此插入後唯一可能的違規：自己（紅）的爸爸也是紅色</text:p>
            <text:p text:style-name="P156"/>
            <text:p text:style-name="P128">三個關鍵角色：</text:p>
            <text:p text:style-name="P128"><text:s/><text:span text:style-name="T32"><text:s/>X = 新插入節點</text:span>（<text:span text:style-name="T61">紅色</text:span>，<text:span text:style-name="T4">違規的那個</text:span>）</text:p>
            <text:p text:style-name="P128"><text:s/><text:span text:style-name="T34"><text:s/>P = X 的父節點</text:span>（<text:span text:style-name="T61">紅色</text:span><text:span text:style-name="T62">­</text:span> <text:span text:style-name="T3">→ 引發違規</text:span>）</text:p>
            <text:p text:style-name="P128"><text:s text:c="2"/>G = X 的祖父節點（一定是黑色，因為插入前整棵樹合法）</text:p>
            <text:p text:style-name="P128"><text:s text:c="2"/><text:span text:style-name="T32">U = X 的叔叔節點</text:span>（<text:span text:style-name="T15">P 的兄弟，可紅可黑</text:span>）</text:p>
          </table:table-cell>
        </table:table-row>
      </table:table>
      <text:p text:style-name="P15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32"><text:s text:c="8"/>G(B) <text:s/>← 祖父，黑色</text:p>
            <text:p text:style-name="P32"><text:s text:c="7"/>/ <text:s text:c="3"/>\</text:p>
            <text:p text:style-name="P32"><text:s text:c="5"/>P(R) <text:s text:c="2"/>U(?) <text:s/>← 叔叔，顏色決定修復方式</text:p>
            <text:p text:style-name="P32"><text:s text:c="4"/>/</text:p>
            <text:p text:style-name="P32"><text:s text:c="2"/>X(R) <text:s/>← 新節點，和 P 都是紅色，違反規則4！</text:p>
          </table:table-cell>
        </table:table-row>
      </table:table>
      <text:p text:style-name="P155"/>
      <text:p text:style-name="P157"/>
      <text:p text:style-name="P82">Case 1：<text:span text:style-name="T34">叔叔 U 是紅色</text:span> → <text:span text:style-name="T32">只改顏色</text:span>，<text:span text:style-name="T21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28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32">修復前： <text:s text:c="23"/>修復後：</text:p>
            <text:p text:style-name="P32"><text:s text:c="6"/>G(B) <text:s text:c="27"/><text:span text:style-name="T32">G(R)</text:span> ← <text:span text:style-name="T54">G 塗紅</text:span>，可能往上繼續違規</text:p>
            <text:p text:style-name="P32"><text:s text:c="5"/>/ <text:s text:c="3"/>\ <text:s text:c="25"/>/ <text:s text:c="3"/>\</text:p>
            <text:p text:style-name="P32"><text:s text:c="3"/>P(R) <text:s text:c="2"/><text:span text:style-name="T39">U(R)</text:span> <text:s text:c="9"/>→ <text:s text:c="9"/><text:span text:style-name="T32">P(B) <text:s/>U(B)</text:span> ← <text:span text:style-name="T34">兩個都塗黑</text:span></text:p>
            <text:p text:style-name="P32"><text:s text:c="3"/>/ <text:s text:c="30"/>/</text:p>
            <text:p text:style-name="P32"><text:s text:c="2"/>X(R) <text:s text:c="27"/>X(R)</text:p>
          </table:table-cell>
        </table:table-row>
      </table:table>
      <text:p text:style-name="P100">為什麼 G 要塗紅？因為 <text:span text:style-name="T63">P 和 U 都變黑，從 G 往下兩條路各多了一個黑節點</text:span>，</text:p>
      <text:p text:style-name="P100"><text:span text:style-name="T12">必須把 G 塗紅來補償黑高</text:span>，<text:span text:style-name="T41">讓規則5維持不變</text:span>。但 G 變紅後可能和 G 的父節點</text:p>
      <text:p text:style-name="P100">又違反規則4，所以要往上繼續檢查，直到 root 或不再違規為止。</text:p>
      <text:p text:style-name="P155"/>
      <text:p text:style-name="P81">Case 2：<text:span text:style-name="T34">叔叔 U 是黑色</text:span>，<text:span text:style-name="T3">且 X 是 P 的右子</text:span> → <text:span text:style-name="T21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28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32">修復前： <text:s text:c="23"/><text:span text:style-name="T23">對 P 左旋後</text:span>（變 Case 3）：</text:p>
            <text:p text:style-name="P32"><text:s text:c="6"/>G(B) <text:s text:c="27"/>G(B)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 text:c="2"/><text:span text:style-name="T32">U(B)</text:span></text:p>
            <text:p text:style-name="P32"><text:s text:c="6"/>\ <text:s text:c="27"/>/</text:p>
            <text:p text:style-name="P32"><text:s text:c="6"/>X(R) ← <text:span text:style-name="T54">X 在右邊</text:span> <text:s text:c="11"/><text:span text:style-name="T15">P(R)</text:span> ← <text:span text:style-name="T54">P 跑下去了</text:span></text:p>
            <text:p text:style-name="P158"/>
            <text:p text:style-name="P33">← 旋轉後：P 在 X 的左邊，符合 Case 3 格局，接著用 Case 3 修復</text:p>
          </table:table-cell>
        </table:table-row>
      </table:table>
      <text:p text:style-name="P155"/>
      <text:p text:style-name="P81">Case 3：<text:span text:style-name="T34">叔叔 U 是黑色</text:span>，<text:span text:style-name="T56">且 X 是 P 的左子</text:span> → <text:span text:style-name="T13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62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32">修復前： <text:s text:c="23"/><text:span text:style-name="T23">對 G 右旋</text:span> + <text:span text:style-name="T15">交換 P/G 顏色</text:span>：</text:p>
            <text:p text:style-name="P32"><text:s text:c="6"/>G(B) <text:s text:c="27"/><text:span text:style-name="T40">P(B)</text:span> ← <text:span text:style-name="T9">原本紅色</text:span>，現在黑色（當新根）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/><text:span text:style-name="T40">G(R)</text:span> ← <text:span text:style-name="T5">原本黑色</text:span>，現在紅色</text:p>
            <text:p text:style-name="P32"><text:s text:c="3"/>/ <text:s text:c="40"/>\</text:p>
            <text:p text:style-name="P32"><text:s text:c="2"/>X(R) <text:s text:c="38"/>U(B)</text:p>
            <text:p text:style-name="P158"/>
            <text:p text:style-name="P32">← P 變黑頂替 G 的位置，黑高不變；G 變紅但右子是 U(B)，不違反規則4</text:p>
            <text:p text:style-name="P32">← 整個子樹修復完成，不需要繼續往上檢查！</text:p>
          </table:table-cell>
        </table:table-row>
      </table:table>
      <text:p text:style-name="P155"/>
      <text:p text:style-name="P81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2">Case</text:p>
          </table:table-cell>
          <table:table-cell table:style-name="表格123.A1" office:value-type="string">
            <text:p text:style-name="P132">叔叔顏色</text:p>
          </table:table-cell>
          <table:table-cell table:style-name="表格123.A1" office:value-type="string">
            <text:p text:style-name="P132">X 的位置</text:p>
          </table:table-cell>
          <table:table-cell table:style-name="表格123.A1" office:value-type="string">
            <text:p text:style-name="P132">操作</text:p>
          </table:table-cell>
          <table:table-cell table:style-name="表格123.A1" office:value-type="string">
            <text:p text:style-name="P132">繼續往上？</text:p>
          </table:table-cell>
        </table:table-row>
        <table:table-row table:style-name="表格123.1">
          <table:table-cell table:style-name="表格123.A2" office:value-type="string">
            <text:p text:style-name="P133">Case 1</text:p>
          </table:table-cell>
          <table:table-cell table:style-name="表格123.B2" office:value-type="string">
            <text:p text:style-name="P145">紅</text:p>
          </table:table-cell>
          <table:table-cell table:style-name="表格123.C2" office:value-type="string">
            <text:p text:style-name="P100">左或右皆可</text:p>
          </table:table-cell>
          <table:table-cell table:style-name="表格123.D2" office:value-type="string">
            <text:p text:style-name="P100">P、U 塗黑；G 塗紅</text:p>
          </table:table-cell>
          <table:table-cell table:style-name="表格123.E2" office:value-type="string">
            <text:p text:style-name="P48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3">Case 2</text:p>
          </table:table-cell>
          <table:table-cell table:style-name="表格123.B3" office:value-type="string">
            <text:p text:style-name="P146">黑</text:p>
          </table:table-cell>
          <table:table-cell table:style-name="表格123.C3" office:value-type="string">
            <text:p text:style-name="P103">P 的右子</text:p>
          </table:table-cell>
          <table:table-cell table:style-name="表格123.D3" office:value-type="string">
            <text:p text:style-name="P100">對 P 左旋 → <text:span text:style-name="T23">變 Case 3</text:span></text:p>
          </table:table-cell>
          <table:table-cell table:style-name="表格123.A1" office:value-type="string">
            <text:p text:style-name="P133">接著 Case 3</text:p>
          </table:table-cell>
        </table:table-row>
        <table:table-row table:style-name="表格123.1">
          <table:table-cell table:style-name="表格123.A4" office:value-type="string">
            <text:p text:style-name="P133">Case 3</text:p>
          </table:table-cell>
          <table:table-cell table:style-name="表格123.B4" office:value-type="string">
            <text:p text:style-name="P146">黑</text:p>
          </table:table-cell>
          <table:table-cell table:style-name="表格123.C4" office:value-type="string">
            <text:p text:style-name="P105">P 的左子</text:p>
          </table:table-cell>
          <table:table-cell table:style-name="表格123.D4" office:value-type="string">
            <text:p text:style-name="P100">對 G 右旋 + <text:span text:style-name="T15">交換 P/G 顏色</text:span></text:p>
          </table:table-cell>
          <table:table-cell table:style-name="表格123.E4" office:value-type="string">
            <text:p text:style-name="P56">❌ 完成！</text:p>
          </table:table-cell>
        </table:table-row>
      </table:table>
      <text:p text:style-name="P15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46">⚠️ <text:span text:style-name="T32">以上三個 Case 的前提</text:span>：<text:span text:style-name="T9">P 是 G 的左子節點</text:span></text:p>
            <text:p text:style-name="P46"><text:span text:style-name="T50">若 P 是 G 的右子節點 → 做法完全對稱</text:span>（左右鏡像互換）：</text:p>
            <text:p text:style-name="P47"><text:s text:c="2"/>Case 2 變成：<text:span text:style-name="T3">X 在 P 的右子</text:span> → <text:span text:style-name="T5">對 P 左旋</text:span></text:p>
            <text:p text:style-name="P47"><text:s text:c="2"/>Case 3 變成：<text:span text:style-name="T64">X 在 P 的左子</text:span> → <text:span text:style-name="T5">對 G 右旋</text:span> + <text:span text:style-name="T15">交換顏色</text:span></text:p>
            <text:p text:style-name="P156"/>
            <text:p text:style-name="P46">最後一步：無論哪個 Case，修復結束後強制把 root 塗成黑色（規則2）。</text:p>
          </table:table-cell>
        </table:table-row>
      </table:table>
      <text:p text:style-name="P15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93">✔ 是</text:p>
          </table:table-cell>
          <table:table-cell table:style-name="表格102.C2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93">✔ 是</text:p>
          </table:table-cell>
          <table:table-cell table:style-name="表格102.C3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93">嚴格高度差 ≤ 1</text:p>
          </table:table-cell>
          <table:table-cell table:style-name="表格102.C4" office:value-type="string">
            <text:p text:style-name="P93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93">更嚴格（更矮）</text:p>
          </table:table-cell>
          <table:table-cell table:style-name="表格102.C5" office:value-type="string">
            <text:p text:style-name="P93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95">略快</text:p>
          </table:table-cell>
          <table:table-cell table:style-name="表格102.C6" office:value-type="string">
            <text:p text:style-name="P96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93">較慢（旋轉多）</text:p>
          </table:table-cell>
          <table:table-cell table:style-name="表格102.C7" office:value-type="string">
            <text:p text:style-name="P93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97">讀多寫少</text:p>
          </table:table-cell>
          <table:table-cell table:style-name="表格102.C8" office:value-type="string">
            <text:p text:style-name="P98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93">少數特殊場景</text:p>
          </table:table-cell>
          <table:table-cell table:style-name="表格102.C9" office:value-type="string">
            <text:p text:style-name="P93">C++ map、Java TreeMap、Linux 排程</text:p>
          </table:table-cell>
        </table:table-row>
      </table:table>
      <text:p text:style-name="P138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4">⚠️ <text:span text:style-name="T15">B-Tree 不是二元樹！</text:span></text:p>
            <text:p text:style-name="P44">Binary Tree = 每個節點最多 2 個子節點</text:p>
            <text:p text:style-name="P44"><text:span text:style-name="T54">B-Tree </text:span>= <text:span text:style-name="T32">每個節點</text:span>可以<text:span text:style-name="T19">有很多個 key </text:span>和<text:span text:style-name="T65">很多個子節點</text:span>（階數決定上限）</text:p>
            <text:p text:style-name="P44">B-Tree 是「<text:span text:style-name="T67">多元搜尋樹（M-ary Search Tree）</text:span>」</text:p>
          </table:table-cell>
        </table:table-row>
      </table:table>
      <text:p text:style-name="P136"/>
      <text:h text:style-name="P6" text:outline-level="2">BT-1　為什麼要發明 B-Tree？</text:h>
      <text:p text:style-name="P93">回憶 <text:span text:style-name="T26">BST 和 AVL Tree 的問題</text:span>：<text:span text:style-name="T15">它們都假設資料在</text:span><text:span text:style-name="T66">記憶體（RAM）</text:span><text:span text:style-name="T15">裡</text:span>。</text:p>
      <text:p text:style-name="P93">但<text:span text:style-name="T9">資料庫的資料放在</text:span><text:span text:style-name="T66">硬碟（Disk）</text:span><text:span text:style-name="T9">上</text:span>，<text:span text:style-name="T68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4"><text:span text:style-name="T32">RAM <text:s/>讀取速度</text:span>：奈秒（ns）級，約 <text:span text:style-name="T32">100 ns</text:span></text:p>
            <text:p text:style-name="P44"><text:span text:style-name="T32">磁碟 讀取速度</text:span>：毫秒（ms）級，約 <text:span text:style-name="T32">5~10 ms</text:span></text:p>
            <text:p text:style-name="P139"/>
            <text:p text:style-name="P159">磁碟比 RAM 慢約 100,000 倍！</text:p>
            <text:p text:style-name="P139"/>
            <text:p text:style-name="P44">BST 有 100 萬筆資料 → 需要 log₂(1,000,000) ≈ 20 次磁碟讀取</text:p>
            <text:p text:style-name="P44">B-Tree（階數500）→ 只需 log₅₀₀(1,000,000) ≈ 4 次磁碟讀取</text:p>
            <text:p text:style-name="P44">→ B-Tree 讓磁碟讀取次數從 20 降到 4，快了 5 倍！</text:p>
          </table:table-cell>
        </table:table-row>
      </table:table>
      <text:p text:style-name="P136"/>
      <text:h text:style-name="P6" text:outline-level="2">BT-2　B-Tree 的結構</text:h>
      <text:p text:style-name="P93"><text:span text:style-name="T32">B-Tree 的核心概念</text:span>：<text:span text:style-name="T15">把很多 key 塞進同一個節點</text:span>，<text:span text:style-name="T69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<text:span text:style-name="T52">階數（Order）m</text:span>」定義了節點的上限：</text:p>
            <text:p text:style-name="P16"><text:s text:c="2"/><text:span text:style-name="T32">每個節點</text:span><text:span text:style-name="T70">最多 m 個子節點</text:span>，<text:span text:style-name="T23">最多 m-1 個 key</text:span></text:p>
            <text:p text:style-name="P16"><text:s text:c="2"/><text:span text:style-name="T29">每個非 root 節點</text:span><text:span text:style-name="T71">最少 ⌈m/2⌉ 個子節點</text:span></text:p>
          </table:table-cell>
        </table:table-row>
      </table:table>
      <text:p text:style-name="P136"/>
      <text:p text:style-name="P93">以「<text:span text:style-name="T39">3 階</text:span> B-Tree」為例（每個節點最多 <text:span text:style-name="T39">2 個 key</text:span>、<text:span text:style-name="T39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<text:span text:style-name="T34">[20 | 50] </text:span><text:s text:c="15"/>← root，有<text:span text:style-name="T34"> 2 個 key</text:span>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41"/>
            <text:p text:style-name="P30">規則（<text:span text:style-name="T15">同 BST 概念，但擴展到多個 key</text:span>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36"/>
      <text:h text:style-name="P142" text:outline-level="2"><text:soft-page-break/><text:span text:style-name="T72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112">所有葉節點在同一層</text:p>
          </table:table-cell>
          <table:table-cell table:style-name="表格107.B2" office:value-type="string">
            <text:p text:style-name="P93"><text:span text:style-name="T39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60">每次搜尋保證 O(log n)</text:p>
          </table:table-cell>
          <table:table-cell table:style-name="表格107.B3" office:value-type="string">
            <text:p text:style-name="P93">雖然底數是 m，<text:span text:style-name="T31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17">節點飽滿時自動分裂</text:p>
          </table:table-cell>
          <table:table-cell table:style-name="表格107.B4" office:value-type="string">
            <text:p text:style-name="P93"><text:span text:style-name="T9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93">刪除後若節點太少，與兄弟合併或借 key</text:p>
          </table:table-cell>
        </table:table-row>
      </table:table>
      <text:p text:style-name="P136"/>
      <text:h text:style-name="P6" text:outline-level="2">BT-4　B+Tree（資料庫最常用）</text:h>
      <text:p text:style-name="P93"><text:span text:style-name="T60">B+Tree</text:span><text:span text:style-name="T39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63">所有節點都存 key 和 data</text:p>
              </text:list-item>
              <text:list-item>
                <text:p text:style-name="P164">搜尋可能在中間節點就結束</text:p>
              </text:list-item>
              <text:list-item>
                <text:p text:style-name="P165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66"><text:span text:style-name="T50">內部節點只存 key</text:span>，<text:span text:style-name="T47">data 只放葉節點</text:span></text:p>
              </text:list-item>
              <text:list-item>
                <text:p text:style-name="P164">搜尋一定走到葉節點才結束</text:p>
              </text:list-item>
              <text:list-item>
                <text:p text:style-name="P166"><text:span text:style-name="T15">所有葉節點串成一條 Linked List</text:span>，範圍查詢超快</text:p>
              </text:list-item>
            </text:list>
          </table:table-cell>
        </table:table-row>
      </table:table>
      <text:p text:style-name="P136"/>
      <text:p text:style-name="P93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36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93">B+Tree</text:p>
          </table:table-cell>
          <table:table-cell table:style-name="表格110.C2" office:value-type="string">
            <text:p text:style-name="P93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93">B+Tree</text:p>
          </table:table-cell>
          <table:table-cell table:style-name="表格110.C3" office:value-type="string">
            <text:p text:style-name="P93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93">B+Tree</text:p>
          </table:table-cell>
          <table:table-cell table:style-name="表格110.C4" office:value-type="string">
            <text:p text:style-name="P93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93">B+Tree</text:p>
          </table:table-cell>
          <table:table-cell table:style-name="表格110.C5" office:value-type="string">
            <text:p text:style-name="P93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93">HTree（B-Tree衍生）</text:p>
          </table:table-cell>
          <table:table-cell table:style-name="表格110.C6" office:value-type="string">
            <text:p text:style-name="P93">大目錄索引</text:p>
          </table:table-cell>
        </table:table-row>
      </table:table>
      <text:p text:style-name="P136"/>
      <text:h text:style-name="P142" text:outline-level="2"><text:soft-page-break/><text:span text:style-name="T72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101">✔ 是</text:p>
          </table:table-cell>
          <table:table-cell table:style-name="表格111.C2" office:value-type="string">
            <text:p text:style-name="P101">✔ 是</text:p>
          </table:table-cell>
          <table:table-cell table:style-name="表格111.D2" office:value-type="string">
            <text:p text:style-name="P101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107">✔ 是</text:p>
          </table:table-cell>
          <table:table-cell table:style-name="表格111.C3" office:value-type="string">
            <text:p text:style-name="P107">✔ 是</text:p>
          </table:table-cell>
          <table:table-cell table:style-name="表格111.D3" office:value-type="string">
            <text:p text:style-name="P107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108">最多 2</text:p>
          </table:table-cell>
          <table:table-cell table:style-name="表格111.C4" office:value-type="string">
            <text:p text:style-name="P108">最多 2</text:p>
          </table:table-cell>
          <table:table-cell table:style-name="表格111.D4" office:value-type="string">
            <text:p text:style-name="P108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93">BF ≤ 1（旋轉）</text:p>
          </table:table-cell>
          <table:table-cell table:style-name="表格111.C5" office:value-type="string">
            <text:p text:style-name="P93">顏色規則（旋轉）</text:p>
          </table:table-cell>
          <table:table-cell table:style-name="表格111.D5" office:value-type="string">
            <text:p text:style-name="P93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93">最矮</text:p>
          </table:table-cell>
          <table:table-cell table:style-name="表格111.C6" office:value-type="string">
            <text:p text:style-name="P93">略高</text:p>
          </table:table-cell>
          <table:table-cell table:style-name="表格111.D6" office:value-type="string">
            <text:p text:style-name="P93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109">O(log n)</text:p>
          </table:table-cell>
          <table:table-cell table:style-name="表格111.C7" office:value-type="string">
            <text:p text:style-name="P109">O(log n)</text:p>
          </table:table-cell>
          <table:table-cell table:style-name="表格111.D7" office:value-type="string">
            <text:p text:style-name="P109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93">O(log n)，旋轉多</text:p>
          </table:table-cell>
          <table:table-cell table:style-name="表格111.C8" office:value-type="string">
            <text:p text:style-name="P93">O(log n)，旋轉少</text:p>
          </table:table-cell>
          <table:table-cell table:style-name="表格111.D8" office:value-type="string">
            <text:p text:style-name="P93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106">記憶體</text:p>
          </table:table-cell>
          <table:table-cell table:style-name="表格111.C9" office:value-type="string">
            <text:p text:style-name="P106">記憶體</text:p>
          </table:table-cell>
          <table:table-cell table:style-name="表格111.D9" office:value-type="string">
            <text:p text:style-name="P106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93">特殊記憶體搜尋</text:p>
          </table:table-cell>
          <table:table-cell table:style-name="表格111.C10" office:value-type="string">
            <text:p text:style-name="P93">C++ map / Java / Linux</text:p>
          </table:table-cell>
          <table:table-cell table:style-name="表格111.D10" office:value-type="string">
            <text:p text:style-name="P93">資料庫索引、檔案系統</text:p>
          </table:table-cell>
        </table:table-row>
      </table:table>
      <text:p text:style-name="P13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1">🎯 核心記憶口訣：</text:p>
            <text:p text:style-name="P61">AVL Tree = <text:span text:style-name="T39">二元樹</text:span><text:span text:style-name="T43"> </text:span>+ 嚴格平衡（BF ≤ 1）→ 讀多寫少場景</text:p>
            <text:p text:style-name="P61">Red-Black Tree = <text:span text:style-name="T39">二元樹 </text:span>+ 顏色規則 → 讀寫平衡場景（最常用）</text:p>
            <text:p text:style-name="P61">B-Tree = <text:span text:style-name="T39">多元樹</text:span> + 磁碟優化 → 資料庫/檔案系統（不是二元樹！）</text:p>
          </table:table-cell>
        </table:table-row>
      </table:table>
      <text:p text:style-name="P143"/>
      <text:h text:style-name="P24" text:outline-level="1">第四章：樹的走訪（Traversal）</text:h>
      <text:p text:style-name="P36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7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7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7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6">Preorder（前序）</text:p>
            <text:p text:style-name="P36">Inorder（中序）</text:p>
            <text:p text:style-name="P36">Postorder（後序）</text:p>
          </table:table-cell>
          <table:table-cell table:style-name="表格24.B1" office:value-type="string">
            <text:p text:style-name="P22">結果</text:p>
            <text:p text:style-name="P36">A B D E C</text:p>
            <text:p text:style-name="P36">D B E A C</text:p>
            <text:p text:style-name="P36">D E B C A</text:p>
          </table:table-cell>
        </table:table-row>
      </table:table>
      <text:p text:style-name="P11"/>
      <text:h text:style-name="P161" text:outline-level="2"><text:soft-page-break/><text:span text:style-name="T72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6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6">一路往深處鑽</text:p>
            <text:p text:style-name="P36">使用 Stack（堆疊）/ 遞迴</text:p>
            <text:p text:style-name="P36">三種：Preorder / Inorder / Postorder</text:p>
            <text:p text:style-name="P36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6">一層一層掃描</text:p>
            <text:p text:style-name="P36">使用 Queue（佇列）</text:p>
            <text:p text:style-name="P36">一種：Level-order</text:p>
            <text:p text:style-name="P36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6">前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2" office:value-type="string">
            <text:p text:style-name="P36">中序可切出左右子樹</text:p>
          </table:table-cell>
        </table:table-row>
        <table:table-row table:style-name="表格28.1">
          <table:table-cell table:style-name="表格28.A3" office:value-type="string">
            <text:p text:style-name="P36">後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3" office:value-type="string">
            <text:p text:style-name="P36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6">前序 + 後序</text:p>
          </table:table-cell>
          <table:table-cell table:style-name="表格28.B4" office:value-type="string">
            <text:p text:style-name="P69">❌ 不唯一</text:p>
          </table:table-cell>
          <table:table-cell table:style-name="表格28.C4" office:value-type="string">
            <text:p text:style-name="P36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1">⚠️ 前序 + 後序何時例外可唯一重建？</text:p>
            <text:p text:style-name="P41">→ 只有當樹中沒有 degree=1 的節點（即 Full Binary Tree）時，才能唯一重建。</text:p>
            <text:p text:style-name="P41">→ 若有 degree=1 的節點，則共有 2^k 種可能（k = degree-1 節點數）。</text:p>
            <text:p text:style-name="P41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6">已知：</text:p>
      <text:list text:style-name="WWNum3">
        <text:list-item text:start-value="1">
          <text:p text:style-name="P167">前序（Preorder）：A B C D E F G H I</text:p>
        </text:list-item>
        <text:list-item>
          <text:p text:style-name="P167">中序（Inorder）：B C A E D G H F I</text:p>
        </text:list-item>
      </text:list>
      <text:p text:style-name="P11"/>
      <text:p text:style-name="P36">步驟一：Preorder 第一個 = A = root</text:p>
      <text:p text:style-name="P36">步驟二：在 Inorder 找 A → 左邊 {B C} = 左子樹；右邊 {E D G H F I} = 右子樹</text:p>
      <text:p text:style-name="P36">步驟三：Preorder 中，A 後面2個（B C）對應左子樹 → 第一個 B = 左子樹 root</text:p>
      <text:p text:style-name="P36">步驟四：在 Inorder {B C} 找 B → 左邊 {} 空 → 右邊 {C}</text:p>
      <text:p text:style-name="P36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51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65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6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40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40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85">定義：每個節點的子節點數只能是 0 或 2，不能是 1。</text:p>
            <text:p text:style-name="P85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51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65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6">限制「形狀」</text:p>
            <text:p text:style-name="P36">最後一層靠左</text:p>
            <text:p text:style-name="P36">Heap 一定是 CBT</text:p>
            <text:p text:style-name="P36">可以有 degree=1 的節點</text:p>
          </table:table-cell>
          <table:table-cell table:style-name="表格38.B1" office:value-type="string">
            <text:p text:style-name="P22">Full Binary Tree</text:p>
            <text:p text:style-name="P36">限制「每個節點的度數」</text:p>
            <text:p text:style-name="P36">每節點 0 或 2 個 child</text:p>
            <text:p text:style-name="P36">不一定是 CBT</text:p>
            <text:p text:style-name="P36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2">Heap = 完全二元樹（Complete Binary Tree）+ 父子大小關係</text:p>
            <text:p text:style-name="P40"/>
            <text:p text:style-name="P162">Max Heap：每個父節點 ≥ 子節點（最大值永遠在 root）</text:p>
            <text:p text:style-name="P162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6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6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1">Heap：只管「父 &gt; 子」（或父 &lt; 子），左右之間沒有大小關係</text:p>
            <text:p text:style-name="P41">BST：嚴格規定「左 &lt; 根 &lt; 右」</text:p>
            <text:p text:style-name="P40"/>
            <text:p text:style-name="P41">例： <text:s text:c="6"/>100 <text:s text:c="10"/>← Max Heap ✅（100&gt;80, 100&gt;50）</text:p>
            <text:p text:style-name="P41"><text:s text:c="10"/>/ <text:s text:c="2"/>\</text:p>
            <text:p text:style-name="P41"><text:s text:c="9"/>80 <text:s text:c="3"/>50 <text:s text:c="7"/>← Heap 合法，但 BST 不合法</text:p>
            <text:p text:style-name="P41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6">現實比喻：急診室掛號——不是先來先看診，而是重傷優先。</text:p>
      <text:p text:style-name="P36">Heap 最適合實作 Priority Queue，因為：</text:p>
      <text:list text:continue-numbering="true" text:style-name="WWNum3">
        <text:list-item>
          <text:p text:style-name="P167">取出最大（或最小）值：只需取出 root → O(log n)</text:p>
        </text:list-item>
        <text:list-item>
          <text:p text:style-name="P167">插入新值：放在最後，向上浮（Sift Up）→ O(log n)</text:p>
        </text:list-item>
        <text:list-item>
          <text:p text:style-name="P167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6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7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6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1">⚠️ 偏斜樹（Skewed Tree）的陣列浪費問題</text:p>
            <text:p text:style-name="P40"/>
            <text:p text:style-name="P41">偏斜樹高度 h 時只有 h 個節點，但陣列需要 2^h − 1 個空間。</text:p>
            <text:p text:style-name="P41">例：右偏斜樹 4 層（4 個節點）需要 2^4 − 1 = 15 個陣列空間，浪費了 11 格。</text:p>
            <text:p text:style-name="P41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8">題目：</text:p>
            <text:p text:style-name="P38"><text:s text:c="2"/>中序（Inorder）：F B A C E I H J G E（圖片原文：FBAC IH JGE）</text:p>
            <text:p text:style-name="P38"><text:s text:c="2"/>後序（Postorder）：原文最後一個為 E</text:p>
            <text:p text:style-name="P40"/>
            <text:p text:style-name="P38">解題步驟：</text:p>
            <text:p text:style-name="P38">1. 後序最後一個 = E = root</text:p>
            <text:p text:style-name="P38">2. 在中序找 E，E 左邊 = 左子樹，右邊 = 右子樹</text:p>
            <text:p text:style-name="P38">3. 繼續遞迴：後序第二最後 = 右子樹 root，以此類推</text:p>
            <text:p text:style-name="P40"/>
            <text:p text:style-name="P38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8">題目：前序=ABCD，後序=DCBA，問共有幾種可能的二元樹？</text:p>
            <text:p text:style-name="P40"/>
            <text:p text:style-name="P38">分析：</text:p>
            <text:p text:style-name="P38">• 前序第一個=A=root，後序最後一個=A ✔</text:p>
            <text:p text:style-name="P38">• 前序第二個=B → B可以是A的左child或右child（兩種）</text:p>
            <text:p text:style-name="P38">• 每個 internal node（A,B,C）各有「貼左或右」2個選擇</text:p>
            <text:p text:style-name="P38">• 共 3 個這樣的節點 → 2³ = 8 種</text:p>
            <text:p text:style-name="P40"/>
            <text:p text:style-name="P38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8">題目：證明 Complete Binary Tree 節點數 n 滿足 2^(h-1) ≤ n ≤ 2^h − 1</text:p>
            <text:p text:style-name="P40"/>
            <text:p text:style-name="P38">前 h-1 層全滿：節點數 = 2^(h-1) − 1</text:p>
            <text:p text:style-name="P38">下界：最後層至少 1 個 → n ≥ 2^(h-1) − 1 + 1 = 2^(h-1) <text:s/>✔</text:p>
            <text:p text:style-name="P38">上界：最後層全滿 → n ≤ 2^(h-1) − 1 + 2^(h-1) = 2^h − 1 <text:s/>✔</text:p>
            <text:p text:style-name="P38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8">題目：用 1D 陣列存樹，root=a[1], left=a[2i], right=a[2i+1]</text:p>
            <text:p text:style-name="P38"><text:s text:c="6"/>引申：1024 的節點 parent=？ <text:s/>right=？</text:p>
            <text:p text:style-name="P40"/>
            <text:p text:style-name="P38">計算：</text:p>
            <text:p text:style-name="P38">• parent(1024) = ⌊1024/2⌋ = 512</text:p>
            <text:p text:style-name="P40"><text:soft-page-break/><text:span text:style-name="T2">• right(1024) <text:s/>= 2×1024+1 <text:s/>= 2049</text:span></text:p>
            <text:p text:style-name="P40"/>
            <text:p text:style-name="P38">★ 偏斜樹（Skewed Tree）：所有節點只有右 child（或只有左 child）</text:p>
            <text:p text:style-name="P38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6">分支數</text:p>
          </table:table-cell>
          <table:table-cell table:style-name="表格52.B2" office:value-type="string">
            <text:p text:style-name="P34">n − 1</text:p>
          </table:table-cell>
          <table:table-cell table:style-name="表格52.C2" office:value-type="string">
            <text:p text:style-name="P36">n個節點n-1條線</text:p>
          </table:table-cell>
        </table:table-row>
        <table:table-row table:style-name="表格52.1">
          <table:table-cell table:style-name="表格52.A3" office:value-type="string">
            <text:p text:style-name="P36">葉節點數</text:p>
          </table:table-cell>
          <table:table-cell table:style-name="表格52.B2" office:value-type="string">
            <text:p text:style-name="P34">n0 = n2 + 1</text:p>
          </table:table-cell>
          <table:table-cell table:style-name="表格52.C3" office:value-type="string">
            <text:p text:style-name="P36">葉比度2多一個</text:p>
          </table:table-cell>
        </table:table-row>
        <table:table-row table:style-name="表格52.1">
          <table:table-cell table:style-name="表格52.A4" office:value-type="string">
            <text:p text:style-name="P36">滿二元樹節點</text:p>
          </table:table-cell>
          <table:table-cell table:style-name="表格52.B2" office:value-type="string">
            <text:p text:style-name="P34">2^h − 1</text:p>
          </table:table-cell>
          <table:table-cell table:style-name="表格52.C4" office:value-type="string">
            <text:p text:style-name="P36">等比級數求和</text:p>
          </table:table-cell>
        </table:table-row>
        <table:table-row table:style-name="表格52.1">
          <table:table-cell table:style-name="表格52.A5" office:value-type="string">
            <text:p text:style-name="P36">CBT節點範圍</text:p>
          </table:table-cell>
          <table:table-cell table:style-name="表格52.B2" office:value-type="string">
            <text:p text:style-name="P34">2^(h−1) ≤ n ≤ 2^h−1</text:p>
          </table:table-cell>
          <table:table-cell table:style-name="表格52.C5" office:value-type="string">
            <text:p text:style-name="P36">夾住中間</text:p>
          </table:table-cell>
        </table:table-row>
        <table:table-row table:style-name="表格52.1">
          <table:table-cell table:style-name="表格52.A6" office:value-type="string">
            <text:p text:style-name="P36">陣列左子</text:p>
          </table:table-cell>
          <table:table-cell table:style-name="表格52.B2" office:value-type="string">
            <text:p text:style-name="P34">a[2i]</text:p>
          </table:table-cell>
          <table:table-cell table:style-name="表格52.C6" office:value-type="string">
            <text:p text:style-name="P36">乘2</text:p>
          </table:table-cell>
        </table:table-row>
        <table:table-row table:style-name="表格52.1">
          <table:table-cell table:style-name="表格52.A7" office:value-type="string">
            <text:p text:style-name="P36">陣列右子</text:p>
          </table:table-cell>
          <table:table-cell table:style-name="表格52.B2" office:value-type="string">
            <text:p text:style-name="P34">a[2i+1]</text:p>
          </table:table-cell>
          <table:table-cell table:style-name="表格52.C7" office:value-type="string">
            <text:p text:style-name="P36">乘2加1</text:p>
          </table:table-cell>
        </table:table-row>
        <table:table-row table:style-name="表格52.1">
          <table:table-cell table:style-name="表格52.A8" office:value-type="string">
            <text:p text:style-name="P36">陣列父節點</text:p>
          </table:table-cell>
          <table:table-cell table:style-name="表格52.B2" office:value-type="string">
            <text:p text:style-name="P34">a[⌊i/2⌋]</text:p>
          </table:table-cell>
          <table:table-cell table:style-name="表格52.C8" office:value-type="string">
            <text:p text:style-name="P36">除2取整</text:p>
          </table:table-cell>
        </table:table-row>
        <table:table-row table:style-name="表格52.1">
          <table:table-cell table:style-name="表格52.A9" office:value-type="string">
            <text:p text:style-name="P36">BST Inorder</text:p>
          </table:table-cell>
          <table:table-cell table:style-name="表格52.B2" office:value-type="string">
            <text:p text:style-name="P34">遞增排序</text:p>
          </table:table-cell>
          <table:table-cell table:style-name="表格52.C9" office:value-type="string">
            <text:p text:style-name="P36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68">Traversal（走訪）：給樹求前/中/後序 → 記住「根的位置」</text:p>
        </text:list-item>
        <text:list-item>
          <text:p text:style-name="P168">重建樹：給前序+中序 → 前序第一個是根，中序切左右</text:p>
        </text:list-item>
        <text:list-item>
          <text:p text:style-name="P168">前序+後序不唯一 → degree-1 節點每個有2種可能 → 2^k 種</text:p>
        </text:list-item>
        <text:list-item>
          <text:p text:style-name="P168">BST 插入刪除 → 刪除兩個子節點最難，找右子樹最小值補位</text:p>
        </text:list-item>
        <text:list-item>
          <text:p text:style-name="P168">Complete Binary Tree 判斷 → 最後一層要靠左</text:p>
        </text:list-item>
        <text:list-item>
          <text:p text:style-name="P168">陣列表示法 → parent=i/2, left=2i, right=2i+1</text:p>
        </text:list-item>
        <text:list-item>
          <text:p text:style-name="P168">Heap Sort → 建 Max Heap → 依序取出 root → O(n log n)</text:p>
        </text:list-item>
        <text:list-item>
          <text:p text:style-name="P168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9">✅ ChatGPT 的大部分說明都正確，以下補充被省略的細節：</text:p>
            <text:p text:style-name="P40"/>
            <text:p text:style-name="P59">1. n0 = n2 + 1 的公式推導 → ChatGPT 有說到 n0,n2 但沒有完整推導</text:p>
            <text:p text:style-name="P59">2. 前序+後序不唯一的精確說法：有 k 個 degree-1 節點 → 2^k 種可能</text:p>
            <text:p text:style-name="P59"><text:s text:c="3"/>（不是「通常不行」，是「有多少個 degree-1 就有多少倍的不確定性」）</text:p>
            <text:p text:style-name="P59">3. 偏斜樹（Skewed Tree）的概念 → ChatGPT 後期有提到但說明較少</text:p>
            <text:p text:style-name="P59">4. 114 Q1 的 8 種可能 → 來自 3 個 degree-1 節點各有 2 選擇（2^3=8）</text:p>
            <text:p text:style-name="P59">5. Complete Binary Tree 公式推導（115 Q2）→ 上下界各需分開說明</text:p>
            <text:p text:style-name="P59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9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6</meta:editing-cycles>
    <meta:creation-date>2026-05-28T00:04:25.669000000</meta:creation-date>
    <dc:date>2026-06-23T08:23:20.852000000</dc:date>
    <meta:generator>MODA_ODF_Application_Tools/3.8.4.2$Windows_X86_64 LibreOffice_project/4fb77107d5af14329e08085efe4fa19b5633383a</meta:generator>
    <meta:editing-duration>P1DT2H57M20S</meta:editing-duration>
    <meta:document-statistic meta:table-count="124" meta:image-count="0" meta:object-count="0" meta:page-count="35" meta:paragraph-count="1076" meta:word-count="11030" meta:character-count="21320" meta:non-whitespace-character-count="15290"/>
  </office:meta>
</office:document-meta>
</file>