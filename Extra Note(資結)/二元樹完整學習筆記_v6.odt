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8.25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8.255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16.51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56" style:family="table">
      <style:table-properties style:width="16.51cm" fo:margin-left="0.002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7" style:family="table">
      <style:table-properties style:width="16.51cm" fo:margin-left="0.002cm" fo:margin-top="0cm" fo:margin-bottom="0cm" table:align="left" style:writing-mode="page"/>
    </style:style>
    <style:style style:name="表格57.A" style:family="table-column">
      <style:table-column-properties style:column-width="2.115cm"/>
    </style:style>
    <style:style style:name="表格57.B" style:family="table-column">
      <style:table-column-properties style:column-width="14.395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7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16.51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2.115cm"/>
    </style:style>
    <style:style style:name="表格59.B" style:family="table-column">
      <style:table-column-properties style:column-width="14.395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59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0" style:family="table">
      <style:table-properties style:width="16.51cm" fo:margin-left="0.002cm" fo:margin-top="0cm" fo:margin-bottom="0cm" table:align="left" style:writing-mode="page"/>
    </style:style>
    <style:style style:name="表格60.A" style:family="table-column">
      <style:table-column-properties style:column-width="2.115cm"/>
    </style:style>
    <style:style style:name="表格60.B" style:family="table-column">
      <style:table-column-properties style:column-width="14.395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0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1" style:family="table">
      <style:table-properties style:width="16.51cm" fo:margin-left="0.002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2" style:family="table">
      <style:table-properties style:width="16.51cm" fo:margin-left="0.002cm" fo:margin-top="0cm" fo:margin-bottom="0cm" table:align="left" style:writing-mode="page"/>
    </style:style>
    <style:style style:name="表格62.A" style:family="table-column">
      <style:table-column-properties style:column-width="2.115cm"/>
    </style:style>
    <style:style style:name="表格62.B" style:family="table-column">
      <style:table-column-properties style:column-width="14.395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2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3" style:family="table">
      <style:table-properties style:width="16.51cm" fo:margin-left="0.002cm" fo:margin-top="0cm" fo:margin-bottom="0cm" table:align="left" style:writing-mode="page"/>
    </style:style>
    <style:style style:name="表格63.A" style:family="table-column">
      <style:table-column-properties style:column-width="16.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4" style:family="table">
      <style:table-properties style:width="16.51cm" fo:margin-left="0.002cm" fo:margin-top="0cm" fo:margin-bottom="0cm" table:align="left" style:writing-mode="page"/>
    </style:style>
    <style:style style:name="表格64.A" style:family="table-column">
      <style:table-column-properties style:column-width="2.115cm"/>
    </style:style>
    <style:style style:name="表格64.B" style:family="table-column">
      <style:table-column-properties style:column-width="14.395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2e75b6" fo:padding-left="0.212cm" fo:padding-right="0.212cm" fo:padding-top="0.176cm" fo:padding-bottom="0.176cm" fo:border="0.1pt solid #2e75b6">
        <style:background-image/>
      </style:table-cell-properties>
    </style:style>
    <style:style style:name="表格64.B1" style:family="table-cell">
      <style:table-cell-properties fo:background-color="#f5f8ff" fo:padding-left="0.282cm" fo:padding-right="0.282cm" fo:padding-top="0.141cm" fo:padding-bottom="0.141cm" fo:border="0.1pt solid #2e75b6">
        <style:background-image/>
      </style:table-cell-properties>
    </style:style>
    <style:style style:name="表格65" style:family="table">
      <style:table-properties style:width="16.51cm" fo:margin-left="0.002cm" fo:margin-top="0cm" fo:margin-bottom="0cm" table:align="left" style:writing-mode="page"/>
    </style:style>
    <style:style style:name="表格65.A" style:family="table-column">
      <style:table-column-properties style:column-width="2.115cm"/>
    </style:style>
    <style:style style:name="表格65.B" style:family="table-column">
      <style:table-column-properties style:column-width="14.395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middle" fo:background-color="#2e75b6" fo:padding-left="0.212cm" fo:padding-right="0.212cm" fo:padding-top="0.176cm" fo:padding-bottom="0.176cm" fo:border="0.1pt solid #375623">
        <style:background-image/>
      </style:table-cell-properties>
    </style:style>
    <style:style style:name="表格65.B1" style:family="table-cell">
      <style:table-cell-properties fo:background-color="#f0fff4" fo:padding-left="0.282cm" fo:padding-right="0.282cm" fo:padding-top="0.141cm" fo:padding-bottom="0.141cm" fo:border="0.1pt solid #375623">
        <style:background-image/>
      </style:table-cell-properties>
    </style:style>
    <style:style style:name="表格66" style:family="table">
      <style:table-properties style:width="16.51cm" fo:margin-left="0.002cm" fo:margin-top="0cm" fo:margin-bottom="0cm" table:align="left" style:writing-mode="page"/>
    </style:style>
    <style:style style:name="表格66.A" style:family="table-column">
      <style:table-column-properties style:column-width="2.469cm"/>
    </style:style>
    <style:style style:name="表格66.B" style:family="table-column">
      <style:table-column-properties style:column-width="14.04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6.B1" style:family="table-cell">
      <style:table-cell-properties fo:padding-left="0.212cm" fo:padding-right="0.212cm" fo:padding-top="0.141cm" fo:padding-bottom="0.141cm" fo:border="0.1pt solid #2e75b6"/>
    </style:style>
    <style:style style:name="表格66.A2" style:family="table-cell">
      <style:table-cell-properties fo:background-color="#e8f4fb" fo:padding-left="0.212cm" fo:padding-right="0.212cm" fo:padding-top="0.141cm" fo:padding-bottom="0.141cm" fo:border="0.1pt solid #2e75b6">
        <style:background-image/>
      </style:table-cell-properties>
    </style:style>
    <style:style style:name="表格66.B2" style:family="table-cell">
      <style:table-cell-properties fo:padding-left="0.212cm" fo:padding-right="0.212cm" fo:padding-top="0.141cm" fo:padding-bottom="0.141cm" fo:border="0.1pt solid #2e75b6"/>
    </style:style>
    <style:style style:name="表格66.B3" style:family="table-cell">
      <style:table-cell-properties fo:padding-left="0.212cm" fo:padding-right="0.212cm" fo:padding-top="0.141cm" fo:padding-bottom="0.141cm" fo:border="0.1pt solid #2e75b6"/>
    </style:style>
    <style:style style:name="表格66.B4" style:family="table-cell">
      <style:table-cell-properties fo:padding-left="0.212cm" fo:padding-right="0.212cm" fo:padding-top="0.141cm" fo:padding-bottom="0.141cm" fo:border="0.1pt solid #2e75b6"/>
    </style:style>
    <style:style style:name="表格66.B5" style:family="table-cell">
      <style:table-cell-properties fo:padding-left="0.212cm" fo:padding-right="0.212cm" fo:padding-top="0.141cm" fo:padding-bottom="0.141cm" fo:border="0.1pt solid #2e75b6"/>
    </style:style>
    <style:style style:name="表格66.B6" style:family="table-cell">
      <style:table-cell-properties fo:padding-left="0.212cm" fo:padding-right="0.212cm" fo:padding-top="0.141cm" fo:padding-bottom="0.141cm" fo:border="0.1pt solid #2e75b6"/>
    </style:style>
    <style:style style:name="表格67" style:family="table">
      <style:table-properties style:width="16.51cm" fo:margin-left="0.002cm" fo:margin-top="0cm" fo:margin-bottom="0cm" table:align="left" style:writing-mode="page"/>
    </style:style>
    <style:style style:name="表格67.A" style:family="table-column">
      <style:table-column-properties style:column-width="16.51cm"/>
    </style:style>
    <style:style style:name="表格67.1" style:family="table-row">
      <style:table-row-properties fo:keep-together="auto"/>
    </style:style>
    <style:style style:name="表格67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68" style:family="table">
      <style:table-properties style:width="16.51cm" fo:margin-left="0.002cm" fo:margin-top="0cm" fo:margin-bottom="0cm" table:align="left" style:writing-mode="page"/>
    </style:style>
    <style:style style:name="表格68.A" style:family="table-column">
      <style:table-column-properties style:column-width="16.51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16.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2cc" fo:padding-left="0.282cm" fo:padding-right="0.282cm" fo:padding-top="0.176cm" fo:padding-bottom="0.176cm" fo:border="0.1pt solid #c55a11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" style:family="table">
      <style:table-properties style:width="16.51cm" fo:margin-left="0.002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3" style:family="table">
      <style:table-properties style:width="16.51cm" fo:margin-left="0.002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4" style:family="table">
      <style:table-properties style:width="16.51cm" fo:margin-left="0.002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16.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16" style:family="table">
      <style:table-properties style:width="16.51cm" fo:margin-left="0.002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7" style:family="table">
      <style:table-properties style:width="16.51cm" fo:margin-left="0.002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8" style:family="table">
      <style:table-properties style:width="16.51cm" fo:margin-left="0.002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69" style:family="table">
      <style:table-properties style:width="16.51cm" fo:margin-left="0.002cm" fo:margin-top="0cm" fo:margin-bottom="0cm" table:align="left" style:writing-mode="page"/>
    </style:style>
    <style:style style:name="表格69.A" style:family="table-column">
      <style:table-column-properties style:column-width="5.29cm"/>
    </style:style>
    <style:style style:name="表格69.B" style:family="table-column">
      <style:table-column-properties style:column-width="5.611cm"/>
    </style:style>
    <style:style style:name="表格69.C" style:family="table-column">
      <style:table-column-properties style:column-width="5.609cm"/>
    </style:style>
    <style:style style:name="表格69.1" style:family="table-row">
      <style:table-row-properties fo:keep-together="auto"/>
    </style:style>
    <style:style style:name="表格69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69.A2" style:family="table-cell">
      <style:table-cell-properties fo:padding-left="0.212cm" fo:padding-right="0.212cm" fo:padding-top="0.141cm" fo:padding-bottom="0.141cm" fo:border="0.1pt solid #2e75b6"/>
    </style:style>
    <style:style style:name="表格69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69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69.A3" style:family="table-cell">
      <style:table-cell-properties fo:padding-left="0.212cm" fo:padding-right="0.212cm" fo:padding-top="0.141cm" fo:padding-bottom="0.141cm" fo:border="0.1pt solid #2e75b6"/>
    </style:style>
    <style:style style:name="表格69.A4" style:family="table-cell">
      <style:table-cell-properties fo:padding-left="0.212cm" fo:padding-right="0.212cm" fo:padding-top="0.141cm" fo:padding-bottom="0.141cm" fo:border="0.1pt solid #2e75b6"/>
    </style:style>
    <style:style style:name="表格70" style:family="table">
      <style:table-properties style:width="16.51cm" fo:margin-left="0.002cm" fo:margin-top="0cm" fo:margin-bottom="0cm" table:align="left" style:writing-mode="page"/>
    </style:style>
    <style:style style:name="表格70.A" style:family="table-column">
      <style:table-column-properties style:column-width="16.51cm"/>
    </style:style>
    <style:style style:name="表格70.1" style:family="table-row">
      <style:table-row-properties fo:keep-together="auto"/>
    </style:style>
    <style:style style:name="表格7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71" style:family="table">
      <style:table-properties style:width="16.51cm" fo:margin-left="0.002cm" fo:margin-top="0cm" fo:margin-bottom="0cm" table:align="left" style:writing-mode="page"/>
    </style:style>
    <style:style style:name="表格71.A" style:family="table-column">
      <style:table-column-properties style:column-width="16.51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72" style:family="table">
      <style:table-properties style:width="16.51cm" fo:margin-left="0.002cm" fo:margin-top="0cm" fo:margin-bottom="0cm" table:align="left" style:writing-mode="page"/>
    </style:style>
    <style:style style:name="表格72.A" style:family="table-column">
      <style:table-column-properties style:column-width="16.51cm"/>
    </style:style>
    <style:style style:name="表格72.1" style:family="table-row">
      <style:table-row-properties fo:keep-together="auto"/>
    </style:style>
    <style:style style:name="表格7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3" style:family="table">
      <style:table-properties style:width="16.51cm" fo:margin-left="0.002cm" fo:margin-top="0cm" fo:margin-bottom="0cm" table:align="left" style:writing-mode="page"/>
    </style:style>
    <style:style style:name="表格73.A" style:family="table-column">
      <style:table-column-properties style:column-width="4.232cm"/>
    </style:style>
    <style:style style:name="表格73.B" style:family="table-column">
      <style:table-column-properties style:column-width="4.233cm"/>
    </style:style>
    <style:style style:name="表格73.D" style:family="table-column">
      <style:table-column-properties style:column-width="3.812cm"/>
    </style:style>
    <style:style style:name="表格73.1" style:family="table-row">
      <style:table-row-properties fo:keep-together="auto"/>
    </style:style>
    <style:style style:name="表格73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3.A2" style:family="table-cell">
      <style:table-cell-properties fo:padding-left="0.212cm" fo:padding-right="0.212cm" fo:padding-top="0.141cm" fo:padding-bottom="0.141cm" fo:border="0.1pt solid #2e75b6"/>
    </style:style>
    <style:style style:name="表格73.B2" style:family="table-cell">
      <style:table-cell-properties fo:padding-left="0.212cm" fo:padding-right="0.212cm" fo:padding-top="0.141cm" fo:padding-bottom="0.141cm" fo:border="0.1pt solid #2e75b6"/>
    </style:style>
    <style:style style:name="表格73.C2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73.A3" style:family="table-cell">
      <style:table-cell-properties fo:padding-left="0.212cm" fo:padding-right="0.212cm" fo:padding-top="0.141cm" fo:padding-bottom="0.141cm" fo:border="0.1pt solid #2e75b6"/>
    </style:style>
    <style:style style:name="表格73.B3" style:family="table-cell">
      <style:table-cell-properties fo:padding-left="0.212cm" fo:padding-right="0.212cm" fo:padding-top="0.141cm" fo:padding-bottom="0.141cm" fo:border="0.1pt solid #2e75b6"/>
    </style:style>
    <style:style style:name="表格73.A4" style:family="table-cell">
      <style:table-cell-properties fo:padding-left="0.212cm" fo:padding-right="0.212cm" fo:padding-top="0.141cm" fo:padding-bottom="0.141cm" fo:border="0.1pt solid #2e75b6"/>
    </style:style>
    <style:style style:name="表格73.B4" style:family="table-cell">
      <style:table-cell-properties fo:padding-left="0.212cm" fo:padding-right="0.212cm" fo:padding-top="0.141cm" fo:padding-bottom="0.141cm" fo:border="0.1pt solid #2e75b6"/>
    </style:style>
    <style:style style:name="表格74" style:family="table">
      <style:table-properties style:width="16.51cm" fo:margin-left="0.002cm" fo:margin-top="0cm" fo:margin-bottom="0cm" table:align="left" style:writing-mode="page"/>
    </style:style>
    <style:style style:name="表格74.A" style:family="table-column">
      <style:table-column-properties style:column-width="16.5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75" style:family="table">
      <style:table-properties style:width="16.51cm" fo:margin-left="0.002cm" fo:margin-top="0cm" fo:margin-bottom="0cm" table:align="left" style:writing-mode="page"/>
    </style:style>
    <style:style style:name="表格75.A" style:family="table-column">
      <style:table-column-properties style:column-width="8.255cm"/>
    </style:style>
    <style:style style:name="表格75.1" style:family="table-row">
      <style:table-row-properties fo:keep-together="auto"/>
    </style:style>
    <style:style style:name="表格7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5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6" style:family="table">
      <style:table-properties style:width="16.51cm" fo:margin-left="0.002cm" fo:margin-top="0cm" fo:margin-bottom="0cm" table:align="left" style:writing-mode="page"/>
    </style:style>
    <style:style style:name="表格76.A" style:family="table-column">
      <style:table-column-properties style:column-width="16.5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7" style:family="table">
      <style:table-properties style:width="16.51cm" fo:margin-left="0.002cm" fo:margin-top="0cm" fo:margin-bottom="0cm" table:align="left" style:writing-mode="page"/>
    </style:style>
    <style:style style:name="表格77.A" style:family="table-column">
      <style:table-column-properties style:column-width="16.5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78" style:family="table">
      <style:table-properties style:width="16.51cm" fo:margin-left="0.002cm" fo:margin-top="0cm" fo:margin-bottom="0cm" table:align="left" style:writing-mode="page"/>
    </style:style>
    <style:style style:name="表格78.A" style:family="table-column">
      <style:table-column-properties style:column-width="3.173cm"/>
    </style:style>
    <style:style style:name="表格78.B" style:family="table-column">
      <style:table-column-properties style:column-width="6.669cm"/>
    </style:style>
    <style:style style:name="表格78.C" style:family="table-column">
      <style:table-column-properties style:column-width="6.668cm"/>
    </style:style>
    <style:style style:name="表格78.1" style:family="table-row">
      <style:table-row-properties fo:keep-together="auto"/>
    </style:style>
    <style:style style:name="表格7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78.A2" style:family="table-cell">
      <style:table-cell-properties fo:padding-left="0.212cm" fo:padding-right="0.212cm" fo:padding-top="0.141cm" fo:padding-bottom="0.141cm" fo:border="0.1pt solid #2e75b6"/>
    </style:style>
    <style:style style:name="表格78.B2" style:family="table-cell">
      <style:table-cell-properties fo:padding-left="0.212cm" fo:padding-right="0.212cm" fo:padding-top="0.141cm" fo:padding-bottom="0.141cm" fo:border="0.1pt solid #2e75b6"/>
    </style:style>
    <style:style style:name="表格78.C2" style:family="table-cell">
      <style:table-cell-properties fo:padding-left="0.212cm" fo:padding-right="0.212cm" fo:padding-top="0.141cm" fo:padding-bottom="0.141cm" fo:border="0.1pt solid #2e75b6"/>
    </style:style>
    <style:style style:name="表格78.A3" style:family="table-cell">
      <style:table-cell-properties fo:padding-left="0.212cm" fo:padding-right="0.212cm" fo:padding-top="0.141cm" fo:padding-bottom="0.141cm" fo:border="0.1pt solid #2e75b6"/>
    </style:style>
    <style:style style:name="表格78.B3" style:family="table-cell">
      <style:table-cell-properties fo:padding-left="0.212cm" fo:padding-right="0.212cm" fo:padding-top="0.141cm" fo:padding-bottom="0.141cm" fo:border="0.1pt solid #2e75b6"/>
    </style:style>
    <style:style style:name="表格78.C3" style:family="table-cell">
      <style:table-cell-properties fo:padding-left="0.212cm" fo:padding-right="0.212cm" fo:padding-top="0.141cm" fo:padding-bottom="0.141cm" fo:border="0.1pt solid #2e75b6"/>
    </style:style>
    <style:style style:name="表格78.A4" style:family="table-cell">
      <style:table-cell-properties fo:padding-left="0.212cm" fo:padding-right="0.212cm" fo:padding-top="0.141cm" fo:padding-bottom="0.141cm" fo:border="0.1pt solid #2e75b6"/>
    </style:style>
    <style:style style:name="表格78.B4" style:family="table-cell">
      <style:table-cell-properties fo:padding-left="0.212cm" fo:padding-right="0.212cm" fo:padding-top="0.141cm" fo:padding-bottom="0.141cm" fo:border="0.1pt solid #2e75b6"/>
    </style:style>
    <style:style style:name="表格78.C4" style:family="table-cell">
      <style:table-cell-properties fo:padding-left="0.212cm" fo:padding-right="0.212cm" fo:padding-top="0.141cm" fo:padding-bottom="0.141cm" fo:border="0.1pt solid #2e75b6"/>
    </style:style>
    <style:style style:name="表格78.A5" style:family="table-cell">
      <style:table-cell-properties fo:padding-left="0.212cm" fo:padding-right="0.212cm" fo:padding-top="0.141cm" fo:padding-bottom="0.141cm" fo:border="0.1pt solid #2e75b6"/>
    </style:style>
    <style:style style:name="表格78.B5" style:family="table-cell">
      <style:table-cell-properties fo:padding-left="0.212cm" fo:padding-right="0.212cm" fo:padding-top="0.141cm" fo:padding-bottom="0.141cm" fo:border="0.1pt solid #2e75b6"/>
    </style:style>
    <style:style style:name="表格78.C5" style:family="table-cell">
      <style:table-cell-properties fo:padding-left="0.212cm" fo:padding-right="0.212cm" fo:padding-top="0.141cm" fo:padding-bottom="0.141cm" fo:border="0.1pt solid #2e75b6"/>
    </style:style>
    <style:style style:name="表格79" style:family="table">
      <style:table-properties style:width="16.51cm" fo:margin-left="0.002cm" fo:margin-top="0cm" fo:margin-bottom="0cm" table:align="left" style:writing-mode="page"/>
    </style:style>
    <style:style style:name="表格79.A" style:family="table-column">
      <style:table-column-properties style:column-width="16.5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80" style:family="table">
      <style:table-properties style:width="16.51cm" fo:margin-left="0.002cm" fo:margin-top="0cm" fo:margin-bottom="0cm" table:align="left" style:writing-mode="page"/>
    </style:style>
    <style:style style:name="表格80.A" style:family="table-column">
      <style:table-column-properties style:column-width="16.51cm"/>
    </style:style>
    <style:style style:name="表格80.1" style:family="table-row">
      <style:table-row-properties fo:keep-together="auto"/>
    </style:style>
    <style:style style:name="表格80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1" style:family="table">
      <style:table-properties style:width="16.51cm" fo:margin-left="0.002cm" fo:margin-top="0cm" fo:margin-bottom="0cm" table:align="left" style:writing-mode="page"/>
    </style:style>
    <style:style style:name="表格81.A" style:family="table-column">
      <style:table-column-properties style:column-width="3.81cm"/>
    </style:style>
    <style:style style:name="表格81.B" style:family="table-column">
      <style:table-column-properties style:column-width="4.2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81.B2" style:family="table-cell">
      <style:table-cell-properties fo:padding-left="0.212cm" fo:padding-right="0.212cm" fo:padding-top="0.141cm" fo:padding-bottom="0.141cm" fo:border="0.1pt solid #2e75b6"/>
    </style:style>
    <style:style style:name="表格81.C2" style:family="table-cell">
      <style:table-cell-properties fo:padding-left="0.212cm" fo:padding-right="0.212cm" fo:padding-top="0.141cm" fo:padding-bottom="0.141cm" fo:border="0.1pt solid #2e75b6"/>
    </style:style>
    <style:style style:name="表格81.D2" style:family="table-cell">
      <style:table-cell-properties fo:padding-left="0.212cm" fo:padding-right="0.212cm" fo:padding-top="0.141cm" fo:padding-bottom="0.141cm" fo:border="0.1pt solid #2e75b6"/>
    </style:style>
    <style:style style:name="表格81.B3" style:family="table-cell">
      <style:table-cell-properties fo:padding-left="0.212cm" fo:padding-right="0.212cm" fo:padding-top="0.141cm" fo:padding-bottom="0.141cm" fo:border="0.1pt solid #2e75b6"/>
    </style:style>
    <style:style style:name="表格81.C3" style:family="table-cell">
      <style:table-cell-properties fo:padding-left="0.212cm" fo:padding-right="0.212cm" fo:padding-top="0.141cm" fo:padding-bottom="0.141cm" fo:border="0.1pt solid #2e75b6"/>
    </style:style>
    <style:style style:name="表格81.D3" style:family="table-cell">
      <style:table-cell-properties fo:padding-left="0.212cm" fo:padding-right="0.212cm" fo:padding-top="0.141cm" fo:padding-bottom="0.141cm" fo:border="0.1pt solid #2e75b6"/>
    </style:style>
    <style:style style:name="表格81.B4" style:family="table-cell">
      <style:table-cell-properties fo:padding-left="0.212cm" fo:padding-right="0.212cm" fo:padding-top="0.141cm" fo:padding-bottom="0.141cm" fo:border="0.1pt solid #2e75b6"/>
    </style:style>
    <style:style style:name="表格81.C4" style:family="table-cell">
      <style:table-cell-properties fo:padding-left="0.212cm" fo:padding-right="0.212cm" fo:padding-top="0.141cm" fo:padding-bottom="0.141cm" fo:border="0.1pt solid #2e75b6"/>
    </style:style>
    <style:style style:name="表格81.D4" style:family="table-cell">
      <style:table-cell-properties fo:padding-left="0.212cm" fo:padding-right="0.212cm" fo:padding-top="0.141cm" fo:padding-bottom="0.141cm" fo:border="0.1pt solid #2e75b6"/>
    </style:style>
    <style:style style:name="表格81.B5" style:family="table-cell">
      <style:table-cell-properties fo:padding-left="0.212cm" fo:padding-right="0.212cm" fo:padding-top="0.141cm" fo:padding-bottom="0.141cm" fo:border="0.1pt solid #2e75b6"/>
    </style:style>
    <style:style style:name="表格81.C5" style:family="table-cell">
      <style:table-cell-properties fo:padding-left="0.212cm" fo:padding-right="0.212cm" fo:padding-top="0.141cm" fo:padding-bottom="0.141cm" fo:border="0.1pt solid #2e75b6"/>
    </style:style>
    <style:style style:name="表格81.D5" style:family="table-cell">
      <style:table-cell-properties fo:padding-left="0.212cm" fo:padding-right="0.212cm" fo:padding-top="0.141cm" fo:padding-bottom="0.141cm" fo:border="0.1pt solid #2e75b6"/>
    </style:style>
    <style:style style:name="表格82" style:family="table">
      <style:table-properties style:width="16.51cm" fo:margin-left="0.002cm" fo:margin-top="0cm" fo:margin-bottom="0cm" table:align="left" style:writing-mode="page"/>
    </style:style>
    <style:style style:name="表格82.A" style:family="table-column">
      <style:table-column-properties style:column-width="16.51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83" style:family="table">
      <style:table-properties style:width="16.51cm" fo:margin-left="0.002cm" fo:margin-top="0cm" fo:margin-bottom="0cm" table:align="left" style:writing-mode="page"/>
    </style:style>
    <style:style style:name="表格83.A" style:family="table-column">
      <style:table-column-properties style:column-width="16.51cm"/>
    </style:style>
    <style:style style:name="表格83.1" style:family="table-row">
      <style:table-row-properties fo:keep-together="auto"/>
    </style:style>
    <style:style style:name="表格8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84" style:family="table">
      <style:table-properties style:width="16.51cm" fo:margin-left="0.002cm" fo:margin-top="0cm" fo:margin-bottom="0cm" table:align="left" style:writing-mode="page"/>
    </style:style>
    <style:style style:name="表格84.A" style:family="table-column">
      <style:table-column-properties style:column-width="16.51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85" style:family="table">
      <style:table-properties style:width="16.51cm" fo:margin-left="0.002cm" fo:margin-top="0cm" fo:margin-bottom="0cm" table:align="left" style:writing-mode="page"/>
    </style:style>
    <style:style style:name="表格85.A" style:family="table-column">
      <style:table-column-properties style:column-width="16.5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86" style:family="table">
      <style:table-properties style:width="16.51cm" fo:margin-left="0.002cm" fo:margin-top="0cm" fo:margin-bottom="0cm" table:align="left" style:writing-mode="page"/>
    </style:style>
    <style:style style:name="表格86.A" style:family="table-column">
      <style:table-column-properties style:column-width="16.51cm"/>
    </style:style>
    <style:style style:name="表格86.1" style:family="table-row">
      <style:table-row-properties fo:keep-together="auto"/>
    </style:style>
    <style:style style:name="表格8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7" style:family="table">
      <style:table-properties style:width="16.51cm" fo:margin-left="0.002cm" fo:margin-top="0cm" fo:margin-bottom="0cm" table:align="left" style:writing-mode="page"/>
    </style:style>
    <style:style style:name="表格87.A" style:family="table-column">
      <style:table-column-properties style:column-width="8.255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87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8" style:family="table">
      <style:table-properties style:width="16.51cm" fo:margin-left="0.002cm" fo:margin-top="0cm" fo:margin-bottom="0cm" table:align="left" style:writing-mode="page"/>
    </style:style>
    <style:style style:name="表格88.A" style:family="table-column">
      <style:table-column-properties style:column-width="16.51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89" style:family="table">
      <style:table-properties style:width="16.51cm" fo:margin-left="0.002cm" fo:margin-top="0cm" fo:margin-bottom="0cm" table:align="left" style:writing-mode="page"/>
    </style:style>
    <style:style style:name="表格89.A" style:family="table-column">
      <style:table-column-properties style:column-width="16.51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0" style:family="table">
      <style:table-properties style:width="16.51cm" fo:margin-left="0.002cm" fo:margin-top="0cm" fo:margin-bottom="0cm" table:align="left" style:writing-mode="page"/>
    </style:style>
    <style:style style:name="表格90.A" style:family="table-column">
      <style:table-column-properties style:column-width="8.255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0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1" style:family="table">
      <style:table-properties style:width="16.51cm" fo:margin-left="0.002cm" fo:margin-top="0cm" fo:margin-bottom="0cm" table:align="left" style:writing-mode="page"/>
    </style:style>
    <style:style style:name="表格91.A" style:family="table-column">
      <style:table-column-properties style:column-width="16.51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2" style:family="table">
      <style:table-properties style:width="16.51cm" fo:margin-left="0.002cm" fo:margin-top="0cm" fo:margin-bottom="0cm" table:align="left" style:writing-mode="page"/>
    </style:style>
    <style:style style:name="表格92.A" style:family="table-column">
      <style:table-column-properties style:column-width="16.51cm"/>
    </style:style>
    <style:style style:name="表格92.1" style:family="table-row">
      <style:table-row-properties fo:keep-together="auto"/>
    </style:style>
    <style:style style:name="表格92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3" style:family="table">
      <style:table-properties style:width="16.51cm" fo:margin-left="0.002cm" fo:margin-top="0cm" fo:margin-bottom="0cm" table:align="left" style:writing-mode="page"/>
    </style:style>
    <style:style style:name="表格93.A" style:family="table-column">
      <style:table-column-properties style:column-width="16.51cm"/>
    </style:style>
    <style:style style:name="表格93.1" style:family="table-row">
      <style:table-row-properties fo:keep-together="auto"/>
    </style:style>
    <style:style style:name="表格9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4" style:family="table">
      <style:table-properties style:width="16.51cm" fo:margin-left="0.002cm" fo:margin-top="0cm" fo:margin-bottom="0cm" table:align="left" style:writing-mode="page"/>
    </style:style>
    <style:style style:name="表格94.A" style:family="table-column">
      <style:table-column-properties style:column-width="16.51cm"/>
    </style:style>
    <style:style style:name="表格94.1" style:family="table-row">
      <style:table-row-properties fo:keep-together="auto"/>
    </style:style>
    <style:style style:name="表格9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95" style:family="table">
      <style:table-properties style:width="16.51cm" fo:margin-left="0.002cm" fo:margin-top="0cm" fo:margin-bottom="0cm" table:align="left" style:writing-mode="page"/>
    </style:style>
    <style:style style:name="表格95.A" style:family="table-column">
      <style:table-column-properties style:column-width="2.538cm"/>
    </style:style>
    <style:style style:name="表格95.B" style:family="table-column">
      <style:table-column-properties style:column-width="5.08cm"/>
    </style:style>
    <style:style style:name="表格95.C" style:family="table-column">
      <style:table-column-properties style:column-width="3.81cm"/>
    </style:style>
    <style:style style:name="表格95.D" style:family="table-column">
      <style:table-column-properties style:column-width="5.082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95.A2" style:family="table-cell">
      <style:table-cell-properties fo:padding-left="0.212cm" fo:padding-right="0.212cm" fo:padding-top="0.141cm" fo:padding-bottom="0.141cm" fo:border="0.1pt solid #2e75b6"/>
    </style:style>
    <style:style style:name="表格95.B2" style:family="table-cell">
      <style:table-cell-properties fo:padding-left="0.212cm" fo:padding-right="0.212cm" fo:padding-top="0.141cm" fo:padding-bottom="0.141cm" fo:border="0.1pt solid #2e75b6"/>
    </style:style>
    <style:style style:name="表格95.C2" style:family="table-cell">
      <style:table-cell-properties fo:padding-left="0.212cm" fo:padding-right="0.212cm" fo:padding-top="0.141cm" fo:padding-bottom="0.141cm" fo:border="0.1pt solid #2e75b6"/>
    </style:style>
    <style:style style:name="表格95.D2" style:family="table-cell">
      <style:table-cell-properties fo:padding-left="0.212cm" fo:padding-right="0.212cm" fo:padding-top="0.141cm" fo:padding-bottom="0.141cm" fo:border="0.1pt solid #2e75b6"/>
    </style:style>
    <style:style style:name="表格95.A3" style:family="table-cell">
      <style:table-cell-properties fo:padding-left="0.212cm" fo:padding-right="0.212cm" fo:padding-top="0.141cm" fo:padding-bottom="0.141cm" fo:border="0.1pt solid #2e75b6"/>
    </style:style>
    <style:style style:name="表格95.B3" style:family="table-cell">
      <style:table-cell-properties fo:padding-left="0.212cm" fo:padding-right="0.212cm" fo:padding-top="0.141cm" fo:padding-bottom="0.141cm" fo:border="0.1pt solid #2e75b6"/>
    </style:style>
    <style:style style:name="表格95.C3" style:family="table-cell">
      <style:table-cell-properties fo:padding-left="0.212cm" fo:padding-right="0.212cm" fo:padding-top="0.141cm" fo:padding-bottom="0.141cm" fo:border="0.1pt solid #2e75b6"/>
    </style:style>
    <style:style style:name="表格95.D3" style:family="table-cell">
      <style:table-cell-properties fo:padding-left="0.212cm" fo:padding-right="0.212cm" fo:padding-top="0.141cm" fo:padding-bottom="0.141cm" fo:border="0.1pt solid #2e75b6"/>
    </style:style>
    <style:style style:name="表格95.A4" style:family="table-cell">
      <style:table-cell-properties fo:padding-left="0.212cm" fo:padding-right="0.212cm" fo:padding-top="0.141cm" fo:padding-bottom="0.141cm" fo:border="0.1pt solid #2e75b6"/>
    </style:style>
    <style:style style:name="表格95.B4" style:family="table-cell">
      <style:table-cell-properties fo:padding-left="0.212cm" fo:padding-right="0.212cm" fo:padding-top="0.141cm" fo:padding-bottom="0.141cm" fo:border="0.1pt solid #2e75b6"/>
    </style:style>
    <style:style style:name="表格95.C4" style:family="table-cell">
      <style:table-cell-properties fo:padding-left="0.212cm" fo:padding-right="0.212cm" fo:padding-top="0.141cm" fo:padding-bottom="0.141cm" fo:border="0.1pt solid #2e75b6"/>
    </style:style>
    <style:style style:name="表格95.D4" style:family="table-cell">
      <style:table-cell-properties fo:padding-left="0.212cm" fo:padding-right="0.212cm" fo:padding-top="0.141cm" fo:padding-bottom="0.141cm" fo:border="0.1pt solid #2e75b6"/>
    </style:style>
    <style:style style:name="表格95.A5" style:family="table-cell">
      <style:table-cell-properties fo:padding-left="0.212cm" fo:padding-right="0.212cm" fo:padding-top="0.141cm" fo:padding-bottom="0.141cm" fo:border="0.1pt solid #2e75b6"/>
    </style:style>
    <style:style style:name="表格95.B5" style:family="table-cell">
      <style:table-cell-properties fo:padding-left="0.212cm" fo:padding-right="0.212cm" fo:padding-top="0.141cm" fo:padding-bottom="0.141cm" fo:border="0.1pt solid #2e75b6"/>
    </style:style>
    <style:style style:name="表格95.C5" style:family="table-cell">
      <style:table-cell-properties fo:padding-left="0.212cm" fo:padding-right="0.212cm" fo:padding-top="0.141cm" fo:padding-bottom="0.141cm" fo:border="0.1pt solid #2e75b6"/>
    </style:style>
    <style:style style:name="表格95.D5" style:family="table-cell">
      <style:table-cell-properties fo:padding-left="0.212cm" fo:padding-right="0.212cm" fo:padding-top="0.141cm" fo:padding-bottom="0.141cm" fo:border="0.1pt solid #2e75b6"/>
    </style:style>
    <style:style style:name="表格96" style:family="table">
      <style:table-properties style:width="16.51cm" fo:margin-left="0.002cm" fo:margin-top="0cm" fo:margin-bottom="0cm" table:align="left" style:writing-mode="page"/>
    </style:style>
    <style:style style:name="表格96.A" style:family="table-column">
      <style:table-column-properties style:column-width="16.51cm"/>
    </style:style>
    <style:style style:name="表格96.1" style:family="table-row">
      <style:table-row-properties fo:keep-together="auto"/>
    </style:style>
    <style:style style:name="表格96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97" style:family="table">
      <style:table-properties style:width="16.51cm" fo:margin-left="0.002cm" fo:margin-top="0cm" fo:margin-bottom="0cm" table:align="left" style:writing-mode="page"/>
    </style:style>
    <style:style style:name="表格97.A" style:family="table-column">
      <style:table-column-properties style:column-width="16.51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98" style:family="table">
      <style:table-properties style:width="16.51cm" fo:margin-left="0.002cm" fo:margin-top="0cm" fo:margin-bottom="0cm" table:align="left" style:writing-mode="page"/>
    </style:style>
    <style:style style:name="表格98.A" style:family="table-column">
      <style:table-column-properties style:column-width="1.268cm"/>
    </style:style>
    <style:style style:name="表格98.B" style:family="table-column">
      <style:table-column-properties style:column-width="15.24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98.B1" style:family="table-cell">
      <style:table-cell-properties fo:padding-left="0.212cm" fo:padding-right="0.212cm" fo:padding-top="0.141cm" fo:padding-bottom="0.141cm" fo:border="0.1pt solid #5b2c6f"/>
    </style:style>
    <style:style style:name="表格98.B2" style:family="table-cell">
      <style:table-cell-properties fo:padding-left="0.212cm" fo:padding-right="0.212cm" fo:padding-top="0.141cm" fo:padding-bottom="0.141cm" fo:border="0.1pt solid #5b2c6f"/>
    </style:style>
    <style:style style:name="表格98.B3" style:family="table-cell">
      <style:table-cell-properties fo:padding-left="0.212cm" fo:padding-right="0.212cm" fo:padding-top="0.141cm" fo:padding-bottom="0.141cm" fo:border="0.1pt solid #5b2c6f"/>
    </style:style>
    <style:style style:name="表格98.B4" style:family="table-cell">
      <style:table-cell-properties fo:padding-left="0.212cm" fo:padding-right="0.212cm" fo:padding-top="0.141cm" fo:padding-bottom="0.141cm" fo:border="0.1pt solid #5b2c6f"/>
    </style:style>
    <style:style style:name="表格98.B5" style:family="table-cell">
      <style:table-cell-properties fo:padding-left="0.212cm" fo:padding-right="0.212cm" fo:padding-top="0.141cm" fo:padding-bottom="0.141cm" fo:border="0.1pt solid #5b2c6f"/>
    </style:style>
    <style:style style:name="表格99" style:family="table">
      <style:table-properties style:width="16.51cm" fo:margin-left="0.002cm" fo:margin-top="0cm" fo:margin-bottom="0cm" table:align="left" style:writing-mode="page"/>
    </style:style>
    <style:style style:name="表格99.A" style:family="table-column">
      <style:table-column-properties style:column-width="16.51cm"/>
    </style:style>
    <style:style style:name="表格99.1" style:family="table-row">
      <style:table-row-properties fo:keep-together="auto"/>
    </style:style>
    <style:style style:name="表格9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13" style:family="table">
      <style:table-properties style:width="16.51cm" fo:margin-left="0.002cm" fo:margin-top="0cm" fo:margin-bottom="0cm" table:align="left" style:writing-mode="page"/>
    </style:style>
    <style:style style:name="表格113.A" style:family="table-column">
      <style:table-column-properties style:column-width="16.51cm"/>
    </style:style>
    <style:style style:name="表格113.1" style:family="table-row">
      <style:table-row-properties fo:keep-together="auto"/>
    </style:style>
    <style:style style:name="表格113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4" style:family="table">
      <style:table-properties style:width="16.51cm" fo:margin-left="0.002cm" fo:margin-top="0cm" fo:margin-bottom="0cm" table:align="left" style:writing-mode="page"/>
    </style:style>
    <style:style style:name="表格114.A" style:family="table-column">
      <style:table-column-properties style:column-width="16.51cm"/>
    </style:style>
    <style:style style:name="表格114.1" style:family="table-row">
      <style:table-row-properties fo:keep-together="auto"/>
    </style:style>
    <style:style style:name="表格114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5" style:family="table">
      <style:table-properties style:width="16.51cm" fo:margin-left="0.002cm" fo:margin-top="0cm" fo:margin-bottom="0cm" table:align="left" style:writing-mode="page"/>
    </style:style>
    <style:style style:name="表格115.A" style:family="table-column">
      <style:table-column-properties style:column-width="1.905cm"/>
    </style:style>
    <style:style style:name="表格115.B" style:family="table-column">
      <style:table-column-properties style:column-width="4.868cm"/>
    </style:style>
    <style:style style:name="表格115.C" style:family="table-column">
      <style:table-column-properties style:column-width="9.737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ead9f5" fo:padding-left="0.212cm" fo:padding-right="0.212cm" fo:padding-top="0.141cm" fo:padding-bottom="0.141cm" fo:border="0.1pt solid #5b2c6f">
        <style:background-image/>
      </style:table-cell-properties>
    </style:style>
    <style:style style:name="表格115.A2" style:family="table-cell">
      <style:table-cell-properties fo:padding-left="0.212cm" fo:padding-right="0.212cm" fo:padding-top="0.141cm" fo:padding-bottom="0.141cm" fo:border="0.1pt solid #5b2c6f"/>
    </style:style>
    <style:style style:name="表格115.B2" style:family="table-cell">
      <style:table-cell-properties fo:background-color="#e2efda" fo:padding-left="0.212cm" fo:padding-right="0.212cm" fo:padding-top="0.141cm" fo:padding-bottom="0.141cm" fo:border="0.1pt solid #5b2c6f">
        <style:background-image/>
      </style:table-cell-properties>
    </style:style>
    <style:style style:name="表格115.C2" style:family="table-cell">
      <style:table-cell-properties fo:padding-left="0.212cm" fo:padding-right="0.212cm" fo:padding-top="0.141cm" fo:padding-bottom="0.141cm" fo:border="0.1pt solid #5b2c6f"/>
    </style:style>
    <style:style style:name="表格115.A3" style:family="table-cell">
      <style:table-cell-properties fo:padding-left="0.212cm" fo:padding-right="0.212cm" fo:padding-top="0.141cm" fo:padding-bottom="0.141cm" fo:border="0.1pt solid #5b2c6f"/>
    </style:style>
    <style:style style:name="表格115.C3" style:family="table-cell">
      <style:table-cell-properties fo:padding-left="0.212cm" fo:padding-right="0.212cm" fo:padding-top="0.141cm" fo:padding-bottom="0.141cm" fo:border="0.1pt solid #5b2c6f"/>
    </style:style>
    <style:style style:name="表格115.A4" style:family="table-cell">
      <style:table-cell-properties fo:padding-left="0.212cm" fo:padding-right="0.212cm" fo:padding-top="0.141cm" fo:padding-bottom="0.141cm" fo:border="0.1pt solid #5b2c6f"/>
    </style:style>
    <style:style style:name="表格115.C4" style:family="table-cell">
      <style:table-cell-properties fo:padding-left="0.212cm" fo:padding-right="0.212cm" fo:padding-top="0.141cm" fo:padding-bottom="0.141cm" fo:border="0.1pt solid #5b2c6f"/>
    </style:style>
    <style:style style:name="表格115.A5" style:family="table-cell">
      <style:table-cell-properties fo:padding-left="0.212cm" fo:padding-right="0.212cm" fo:padding-top="0.141cm" fo:padding-bottom="0.141cm" fo:border="0.1pt solid #5b2c6f"/>
    </style:style>
    <style:style style:name="表格115.C5" style:family="table-cell">
      <style:table-cell-properties fo:padding-left="0.212cm" fo:padding-right="0.212cm" fo:padding-top="0.141cm" fo:padding-bottom="0.141cm" fo:border="0.1pt solid #5b2c6f"/>
    </style:style>
    <style:style style:name="表格115.A6" style:family="table-cell">
      <style:table-cell-properties fo:padding-left="0.212cm" fo:padding-right="0.212cm" fo:padding-top="0.141cm" fo:padding-bottom="0.141cm" fo:border="0.1pt solid #5b2c6f"/>
    </style:style>
    <style:style style:name="表格115.C6" style:family="table-cell">
      <style:table-cell-properties fo:padding-left="0.212cm" fo:padding-right="0.212cm" fo:padding-top="0.141cm" fo:padding-bottom="0.141cm" fo:border="0.1pt solid #5b2c6f"/>
    </style:style>
    <style:style style:name="表格116" style:family="table">
      <style:table-properties style:width="16.51cm" fo:margin-left="0.002cm" fo:margin-top="0cm" fo:margin-bottom="0cm" table:align="left" style:writing-mode="page"/>
    </style:style>
    <style:style style:name="表格116.A" style:family="table-column">
      <style:table-column-properties style:column-width="16.51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7" style:family="table">
      <style:table-properties style:width="16.51cm" fo:margin-left="0.002cm" fo:margin-top="0cm" fo:margin-bottom="0cm" table:align="left" style:writing-mode="page"/>
    </style:style>
    <style:style style:name="表格117.A" style:family="table-column">
      <style:table-column-properties style:column-width="16.51cm"/>
    </style:style>
    <style:style style:name="表格117.1" style:family="table-row">
      <style:table-row-properties fo:keep-together="auto"/>
    </style:style>
    <style:style style:name="表格117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0" style:family="table">
      <style:table-properties style:width="16.51cm" fo:margin-left="0.002cm" fo:margin-top="0cm" fo:margin-bottom="0cm" table:align="left" style:writing-mode="page"/>
    </style:style>
    <style:style style:name="表格100.A" style:family="table-column">
      <style:table-column-properties style:column-width="16.5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01" style:family="table">
      <style:table-properties style:width="16.51cm" fo:margin-left="0.002cm" fo:margin-top="0cm" fo:margin-bottom="0cm" table:align="left" style:writing-mode="page"/>
    </style:style>
    <style:style style:name="表格101.A" style:family="table-column">
      <style:table-column-properties style:column-width="8.255cm"/>
    </style:style>
    <style:style style:name="表格101.1" style:family="table-row">
      <style:table-row-properties style:min-row-height="2.716cm" fo:keep-together="auto"/>
    </style:style>
    <style:style style:name="表格10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1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18" style:family="table">
      <style:table-properties style:width="16.51cm" fo:margin-left="0.002cm" fo:margin-top="0cm" fo:margin-bottom="0cm" table:align="left" style:writing-mode="page"/>
    </style:style>
    <style:style style:name="表格118.A" style:family="table-column">
      <style:table-column-properties style:column-width="16.51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19" style:family="table">
      <style:table-properties style:width="16.51cm" fo:margin-left="0.002cm" fo:margin-top="0cm" fo:margin-bottom="0cm" table:align="left" style:writing-mode="page"/>
    </style:style>
    <style:style style:name="表格119.A" style:family="table-column">
      <style:table-column-properties style:column-width="16.51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0" style:family="table">
      <style:table-properties style:width="16.51cm" fo:margin-left="0.002cm" fo:margin-top="0cm" fo:margin-bottom="0cm" table:align="left" style:writing-mode="page"/>
    </style:style>
    <style:style style:name="表格120.A" style:family="table-column">
      <style:table-column-properties style:column-width="16.51cm"/>
    </style:style>
    <style:style style:name="表格120.1" style:family="table-row">
      <style:table-row-properties fo:keep-together="auto"/>
    </style:style>
    <style:style style:name="表格120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0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1" style:family="table">
      <style:table-properties style:width="16.51cm" fo:margin-left="0.002cm" fo:margin-top="0cm" fo:margin-bottom="0cm" table:align="left" style:writing-mode="page"/>
    </style:style>
    <style:style style:name="表格121.A" style:family="table-column">
      <style:table-column-properties style:column-width="16.51cm"/>
    </style:style>
    <style:style style:name="表格121.1" style:family="table-row">
      <style:table-row-properties fo:keep-together="auto"/>
    </style:style>
    <style:style style:name="表格121.A1" style:family="table-cell">
      <style:table-cell-properties fo:background-color="#ead9f5" fo:padding-left="0.282cm" fo:padding-right="0.282cm" fo:padding-top="0.176cm" fo:padding-bottom="0.176cm" fo:border="0.1pt solid #5b2c6f">
        <style:background-image/>
      </style:table-cell-properties>
    </style:style>
    <style:style style:name="表格121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2" style:family="table">
      <style:table-properties style:width="16.51cm" fo:margin-left="0.002cm" fo:margin-top="0cm" fo:margin-bottom="0cm" table:align="left" style:writing-mode="page"/>
    </style:style>
    <style:style style:name="表格122.A" style:family="table-column">
      <style:table-column-properties style:column-width="16.51cm"/>
    </style:style>
    <style:style style:name="表格122.1" style:family="table-row">
      <style:table-row-properties fo:keep-together="auto"/>
    </style:style>
    <style:style style:name="表格12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22.A2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23" style:family="table">
      <style:table-properties style:width="16.51cm" fo:margin-left="0.002cm" fo:margin-top="0cm" fo:margin-bottom="0cm" table:align="left" style:writing-mode="page"/>
    </style:style>
    <style:style style:name="表格123.A" style:family="table-column">
      <style:table-column-properties style:column-width="1.905cm"/>
    </style:style>
    <style:style style:name="表格123.B" style:family="table-column">
      <style:table-column-properties style:column-width="3.175cm"/>
    </style:style>
    <style:style style:name="表格123.C" style:family="table-column">
      <style:table-column-properties style:column-width="3.81cm"/>
    </style:style>
    <style:style style:name="表格123.D" style:family="table-column">
      <style:table-column-properties style:column-width="4.233cm"/>
    </style:style>
    <style:style style:name="表格123.E" style:family="table-column">
      <style:table-column-properties style:column-width="3.387cm"/>
    </style:style>
    <style:style style:name="表格123.1" style:family="table-row">
      <style:table-row-properties fo:keep-together="auto"/>
    </style:style>
    <style:style style:name="表格123.A1" style:family="table-cell">
      <style:table-cell-properties fo:background-color="#ead9f5" fo:padding="0.141cm" fo:border="0.1pt solid #5b2c6f">
        <style:background-image/>
      </style:table-cell-properties>
    </style:style>
    <style:style style:name="表格123.A2" style:family="table-cell">
      <style:table-cell-properties fo:padding="0.141cm" fo:border="0.1pt solid #5b2c6f"/>
    </style:style>
    <style:style style:name="表格123.B2" style:family="table-cell">
      <style:table-cell-properties fo:padding="0.141cm" fo:border="0.1pt solid #5b2c6f"/>
    </style:style>
    <style:style style:name="表格123.C2" style:family="table-cell">
      <style:table-cell-properties fo:padding="0.141cm" fo:border="0.1pt solid #5b2c6f"/>
    </style:style>
    <style:style style:name="表格123.D2" style:family="table-cell">
      <style:table-cell-properties fo:padding="0.141cm" fo:border="0.1pt solid #5b2c6f"/>
    </style:style>
    <style:style style:name="表格123.E2" style:family="table-cell">
      <style:table-cell-properties fo:background-color="#fce4d6" fo:padding="0.141cm" fo:border="0.1pt solid #5b2c6f">
        <style:background-image/>
      </style:table-cell-properties>
    </style:style>
    <style:style style:name="表格123.A3" style:family="table-cell">
      <style:table-cell-properties fo:padding="0.141cm" fo:border="0.1pt solid #5b2c6f"/>
    </style:style>
    <style:style style:name="表格123.B3" style:family="table-cell">
      <style:table-cell-properties fo:padding="0.141cm" fo:border="0.1pt solid #5b2c6f"/>
    </style:style>
    <style:style style:name="表格123.C3" style:family="table-cell">
      <style:table-cell-properties fo:padding="0.141cm" fo:border="0.1pt solid #5b2c6f"/>
    </style:style>
    <style:style style:name="表格123.D3" style:family="table-cell">
      <style:table-cell-properties fo:padding="0.141cm" fo:border="0.1pt solid #5b2c6f"/>
    </style:style>
    <style:style style:name="表格123.A4" style:family="table-cell">
      <style:table-cell-properties fo:padding="0.141cm" fo:border="0.1pt solid #5b2c6f"/>
    </style:style>
    <style:style style:name="表格123.B4" style:family="table-cell">
      <style:table-cell-properties fo:padding="0.141cm" fo:border="0.1pt solid #5b2c6f"/>
    </style:style>
    <style:style style:name="表格123.C4" style:family="table-cell">
      <style:table-cell-properties fo:padding="0.141cm" fo:border="0.1pt solid #5b2c6f"/>
    </style:style>
    <style:style style:name="表格123.D4" style:family="table-cell">
      <style:table-cell-properties fo:padding="0.141cm" fo:border="0.1pt solid #5b2c6f"/>
    </style:style>
    <style:style style:name="表格123.E4" style:family="table-cell">
      <style:table-cell-properties fo:background-color="#e2efda" fo:padding="0.141cm" fo:border="0.1pt solid #5b2c6f">
        <style:background-image/>
      </style:table-cell-properties>
    </style:style>
    <style:style style:name="表格124" style:family="table">
      <style:table-properties style:width="16.51cm" fo:margin-left="0.002cm" fo:margin-top="0cm" fo:margin-bottom="0cm" table:align="left" style:writing-mode="page"/>
    </style:style>
    <style:style style:name="表格124.A" style:family="table-column">
      <style:table-column-properties style:column-width="16.51cm"/>
    </style:style>
    <style:style style:name="表格124.1" style:family="table-row">
      <style:table-row-properties fo:keep-together="auto"/>
    </style:style>
    <style:style style:name="表格12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2" style:family="table">
      <style:table-properties style:width="16.51cm" fo:margin-left="0.002cm" fo:margin-top="0cm" fo:margin-bottom="0cm" table:align="left" style:writing-mode="page"/>
    </style:style>
    <style:style style:name="表格102.A" style:family="table-column">
      <style:table-column-properties style:column-width="5.08cm"/>
    </style:style>
    <style:style style:name="表格102.B" style:family="table-column">
      <style:table-column-properties style:column-width="5.713cm"/>
    </style:style>
    <style:style style:name="表格102.C" style:family="table-column">
      <style:table-column-properties style:column-width="5.717cm"/>
    </style:style>
    <style:style style:name="表格102.1" style:family="table-row">
      <style:table-row-properties fo:keep-together="auto"/>
    </style:style>
    <style:style style:name="表格10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2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02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02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02.B2" style:family="table-cell">
      <style:table-cell-properties fo:padding-left="0.212cm" fo:padding-right="0.212cm" fo:padding-top="0.141cm" fo:padding-bottom="0.141cm" fo:border="0.1pt solid #2e75b6"/>
    </style:style>
    <style:style style:name="表格102.C2" style:family="table-cell">
      <style:table-cell-properties fo:padding-left="0.212cm" fo:padding-right="0.212cm" fo:padding-top="0.141cm" fo:padding-bottom="0.141cm" fo:border="0.1pt solid #2e75b6"/>
    </style:style>
    <style:style style:name="表格102.B3" style:family="table-cell">
      <style:table-cell-properties fo:padding-left="0.212cm" fo:padding-right="0.212cm" fo:padding-top="0.141cm" fo:padding-bottom="0.141cm" fo:border="0.1pt solid #2e75b6"/>
    </style:style>
    <style:style style:name="表格102.C3" style:family="table-cell">
      <style:table-cell-properties fo:padding-left="0.212cm" fo:padding-right="0.212cm" fo:padding-top="0.141cm" fo:padding-bottom="0.141cm" fo:border="0.1pt solid #2e75b6"/>
    </style:style>
    <style:style style:name="表格102.B4" style:family="table-cell">
      <style:table-cell-properties fo:padding-left="0.212cm" fo:padding-right="0.212cm" fo:padding-top="0.141cm" fo:padding-bottom="0.141cm" fo:border="0.1pt solid #2e75b6"/>
    </style:style>
    <style:style style:name="表格102.C4" style:family="table-cell">
      <style:table-cell-properties fo:padding-left="0.212cm" fo:padding-right="0.212cm" fo:padding-top="0.141cm" fo:padding-bottom="0.141cm" fo:border="0.1pt solid #2e75b6"/>
    </style:style>
    <style:style style:name="表格102.B5" style:family="table-cell">
      <style:table-cell-properties fo:padding-left="0.212cm" fo:padding-right="0.212cm" fo:padding-top="0.141cm" fo:padding-bottom="0.141cm" fo:border="0.1pt solid #2e75b6"/>
    </style:style>
    <style:style style:name="表格102.C5" style:family="table-cell">
      <style:table-cell-properties fo:padding-left="0.212cm" fo:padding-right="0.212cm" fo:padding-top="0.141cm" fo:padding-bottom="0.141cm" fo:border="0.1pt solid #2e75b6"/>
    </style:style>
    <style:style style:name="表格102.B6" style:family="table-cell">
      <style:table-cell-properties fo:padding-left="0.212cm" fo:padding-right="0.212cm" fo:padding-top="0.141cm" fo:padding-bottom="0.141cm" fo:border="0.1pt solid #2e75b6"/>
    </style:style>
    <style:style style:name="表格102.C6" style:family="table-cell">
      <style:table-cell-properties fo:padding-left="0.212cm" fo:padding-right="0.212cm" fo:padding-top="0.141cm" fo:padding-bottom="0.141cm" fo:border="0.1pt solid #2e75b6"/>
    </style:style>
    <style:style style:name="表格102.B7" style:family="table-cell">
      <style:table-cell-properties fo:padding-left="0.212cm" fo:padding-right="0.212cm" fo:padding-top="0.141cm" fo:padding-bottom="0.141cm" fo:border="0.1pt solid #2e75b6"/>
    </style:style>
    <style:style style:name="表格102.C7" style:family="table-cell">
      <style:table-cell-properties fo:padding-left="0.212cm" fo:padding-right="0.212cm" fo:padding-top="0.141cm" fo:padding-bottom="0.141cm" fo:border="0.1pt solid #2e75b6"/>
    </style:style>
    <style:style style:name="表格102.B8" style:family="table-cell">
      <style:table-cell-properties fo:padding-left="0.212cm" fo:padding-right="0.212cm" fo:padding-top="0.141cm" fo:padding-bottom="0.141cm" fo:border="0.1pt solid #2e75b6"/>
    </style:style>
    <style:style style:name="表格102.C8" style:family="table-cell">
      <style:table-cell-properties fo:padding-left="0.212cm" fo:padding-right="0.212cm" fo:padding-top="0.141cm" fo:padding-bottom="0.141cm" fo:border="0.1pt solid #2e75b6"/>
    </style:style>
    <style:style style:name="表格102.B9" style:family="table-cell">
      <style:table-cell-properties fo:padding-left="0.212cm" fo:padding-right="0.212cm" fo:padding-top="0.141cm" fo:padding-bottom="0.141cm" fo:border="0.1pt solid #2e75b6"/>
    </style:style>
    <style:style style:name="表格102.C9" style:family="table-cell">
      <style:table-cell-properties fo:padding-left="0.212cm" fo:padding-right="0.212cm" fo:padding-top="0.141cm" fo:padding-bottom="0.141cm" fo:border="0.1pt solid #2e75b6"/>
    </style:style>
    <style:style style:name="表格103" style:family="table">
      <style:table-properties style:width="16.51cm" fo:margin-left="0.002cm" fo:margin-top="0cm" fo:margin-bottom="0cm" table:align="left" style:writing-mode="page"/>
    </style:style>
    <style:style style:name="表格103.A" style:family="table-column">
      <style:table-column-properties style:column-width="16.51cm"/>
    </style:style>
    <style:style style:name="表格103.1" style:family="table-row">
      <style:table-row-properties style:min-row-height="2.681cm" fo:keep-together="auto"/>
    </style:style>
    <style:style style:name="表格10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4" style:family="table">
      <style:table-properties style:width="16.51cm" fo:margin-left="0.002cm" fo:margin-top="0cm" fo:margin-bottom="0cm" table:align="left" style:writing-mode="page"/>
    </style:style>
    <style:style style:name="表格104.A" style:family="table-column">
      <style:table-column-properties style:column-width="16.51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105" style:family="table">
      <style:table-properties style:width="16.51cm" fo:margin-left="0.002cm" fo:margin-top="0cm" fo:margin-bottom="0cm" table:align="left" style:writing-mode="page"/>
    </style:style>
    <style:style style:name="表格105.A" style:family="table-column">
      <style:table-column-properties style:column-width="16.51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106" style:family="table">
      <style:table-properties style:width="16.51cm" fo:margin-left="0.002cm" fo:margin-top="0cm" fo:margin-bottom="0cm" table:align="left" style:writing-mode="page"/>
    </style:style>
    <style:style style:name="表格106.A" style:family="table-column">
      <style:table-column-properties style:column-width="16.51cm"/>
    </style:style>
    <style:style style:name="表格106.1" style:family="table-row">
      <style:table-row-properties fo:keep-together="auto"/>
    </style:style>
    <style:style style:name="表格106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07" style:family="table">
      <style:table-properties style:width="16.51cm" fo:margin-left="0.002cm" fo:margin-top="0cm" fo:margin-bottom="0cm" table:align="left" style:writing-mode="page"/>
    </style:style>
    <style:style style:name="表格107.A" style:family="table-column">
      <style:table-column-properties style:column-width="6.348cm"/>
    </style:style>
    <style:style style:name="表格107.B" style:family="table-column">
      <style:table-column-properties style:column-width="10.162cm"/>
    </style:style>
    <style:style style:name="表格107.1" style:family="table-row">
      <style:table-row-properties fo:keep-together="auto"/>
    </style:style>
    <style:style style:name="表格107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07.A2" style:family="table-cell">
      <style:table-cell-properties fo:padding-left="0.212cm" fo:padding-right="0.212cm" fo:padding-top="0.141cm" fo:padding-bottom="0.141cm" fo:border="0.1pt solid #1f7272"/>
    </style:style>
    <style:style style:name="表格107.B2" style:family="table-cell">
      <style:table-cell-properties fo:padding-left="0.212cm" fo:padding-right="0.212cm" fo:padding-top="0.141cm" fo:padding-bottom="0.141cm" fo:border="0.1pt solid #1f7272"/>
    </style:style>
    <style:style style:name="表格107.A3" style:family="table-cell">
      <style:table-cell-properties fo:padding-left="0.212cm" fo:padding-right="0.212cm" fo:padding-top="0.141cm" fo:padding-bottom="0.141cm" fo:border="0.1pt solid #1f7272"/>
    </style:style>
    <style:style style:name="表格107.B3" style:family="table-cell">
      <style:table-cell-properties fo:padding-left="0.212cm" fo:padding-right="0.212cm" fo:padding-top="0.141cm" fo:padding-bottom="0.141cm" fo:border="0.1pt solid #1f7272"/>
    </style:style>
    <style:style style:name="表格107.A4" style:family="table-cell">
      <style:table-cell-properties fo:padding-left="0.212cm" fo:padding-right="0.212cm" fo:padding-top="0.141cm" fo:padding-bottom="0.141cm" fo:border="0.1pt solid #1f7272"/>
    </style:style>
    <style:style style:name="表格107.B4" style:family="table-cell">
      <style:table-cell-properties fo:padding-left="0.212cm" fo:padding-right="0.212cm" fo:padding-top="0.141cm" fo:padding-bottom="0.141cm" fo:border="0.1pt solid #1f7272"/>
    </style:style>
    <style:style style:name="表格107.A5" style:family="table-cell">
      <style:table-cell-properties fo:padding-left="0.212cm" fo:padding-right="0.212cm" fo:padding-top="0.141cm" fo:padding-bottom="0.141cm" fo:border="0.1pt solid #1f7272"/>
    </style:style>
    <style:style style:name="表格107.B5" style:family="table-cell">
      <style:table-cell-properties fo:padding-left="0.212cm" fo:padding-right="0.212cm" fo:padding-top="0.141cm" fo:padding-bottom="0.141cm" fo:border="0.1pt solid #1f7272"/>
    </style:style>
    <style:style style:name="表格108" style:family="table">
      <style:table-properties style:width="16.51cm" fo:margin-left="0.002cm" fo:margin-top="0cm" fo:margin-bottom="0cm" table:align="left" style:writing-mode="page"/>
    </style:style>
    <style:style style:name="表格108.A" style:family="table-column">
      <style:table-column-properties style:column-width="8.255cm"/>
    </style:style>
    <style:style style:name="表格108.1" style:family="table-row">
      <style:table-row-properties fo:keep-together="auto"/>
    </style:style>
    <style:style style:name="表格10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0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109" style:family="table">
      <style:table-properties style:width="16.51cm" fo:margin-left="0.002cm" fo:margin-top="0cm" fo:margin-bottom="0cm" table:align="left" style:writing-mode="page"/>
    </style:style>
    <style:style style:name="表格109.A" style:family="table-column">
      <style:table-column-properties style:column-width="16.51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0f4ff" fo:padding-left="0.353cm" fo:padding-right="0.353cm" fo:padding-top="0.212cm" fo:padding-bottom="0.212cm" fo:border="0.1pt solid #2e75b6">
        <style:background-image/>
      </style:table-cell-properties>
    </style:style>
    <style:style style:name="表格110" style:family="table">
      <style:table-properties style:width="16.51cm" fo:margin-left="0.002cm" fo:margin-top="0cm" fo:margin-bottom="0cm" table:align="left" style:writing-mode="page"/>
    </style:style>
    <style:style style:name="表格110.A" style:family="table-column">
      <style:table-column-properties style:column-width="4.232cm"/>
    </style:style>
    <style:style style:name="表格110.B" style:family="table-column">
      <style:table-column-properties style:column-width="6.138cm"/>
    </style:style>
    <style:style style:name="表格110.C" style:family="table-column">
      <style:table-column-properties style:column-width="6.14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d0eeee" fo:padding-left="0.212cm" fo:padding-right="0.212cm" fo:padding-top="0.141cm" fo:padding-bottom="0.141cm" fo:border="0.1pt solid #1f7272">
        <style:background-image/>
      </style:table-cell-properties>
    </style:style>
    <style:style style:name="表格110.A2" style:family="table-cell">
      <style:table-cell-properties fo:padding-left="0.212cm" fo:padding-right="0.212cm" fo:padding-top="0.141cm" fo:padding-bottom="0.141cm" fo:border="0.1pt solid #1f7272"/>
    </style:style>
    <style:style style:name="表格110.B2" style:family="table-cell">
      <style:table-cell-properties fo:padding-left="0.212cm" fo:padding-right="0.212cm" fo:padding-top="0.141cm" fo:padding-bottom="0.141cm" fo:border="0.1pt solid #1f7272"/>
    </style:style>
    <style:style style:name="表格110.C2" style:family="table-cell">
      <style:table-cell-properties fo:padding-left="0.212cm" fo:padding-right="0.212cm" fo:padding-top="0.141cm" fo:padding-bottom="0.141cm" fo:border="0.1pt solid #1f7272"/>
    </style:style>
    <style:style style:name="表格110.A3" style:family="table-cell">
      <style:table-cell-properties fo:padding-left="0.212cm" fo:padding-right="0.212cm" fo:padding-top="0.141cm" fo:padding-bottom="0.141cm" fo:border="0.1pt solid #1f7272"/>
    </style:style>
    <style:style style:name="表格110.B3" style:family="table-cell">
      <style:table-cell-properties fo:padding-left="0.212cm" fo:padding-right="0.212cm" fo:padding-top="0.141cm" fo:padding-bottom="0.141cm" fo:border="0.1pt solid #1f7272"/>
    </style:style>
    <style:style style:name="表格110.C3" style:family="table-cell">
      <style:table-cell-properties fo:padding-left="0.212cm" fo:padding-right="0.212cm" fo:padding-top="0.141cm" fo:padding-bottom="0.141cm" fo:border="0.1pt solid #1f7272"/>
    </style:style>
    <style:style style:name="表格110.A4" style:family="table-cell">
      <style:table-cell-properties fo:padding-left="0.212cm" fo:padding-right="0.212cm" fo:padding-top="0.141cm" fo:padding-bottom="0.141cm" fo:border="0.1pt solid #1f7272"/>
    </style:style>
    <style:style style:name="表格110.B4" style:family="table-cell">
      <style:table-cell-properties fo:padding-left="0.212cm" fo:padding-right="0.212cm" fo:padding-top="0.141cm" fo:padding-bottom="0.141cm" fo:border="0.1pt solid #1f7272"/>
    </style:style>
    <style:style style:name="表格110.C4" style:family="table-cell">
      <style:table-cell-properties fo:padding-left="0.212cm" fo:padding-right="0.212cm" fo:padding-top="0.141cm" fo:padding-bottom="0.141cm" fo:border="0.1pt solid #1f7272"/>
    </style:style>
    <style:style style:name="表格110.A5" style:family="table-cell">
      <style:table-cell-properties fo:padding-left="0.212cm" fo:padding-right="0.212cm" fo:padding-top="0.141cm" fo:padding-bottom="0.141cm" fo:border="0.1pt solid #1f7272"/>
    </style:style>
    <style:style style:name="表格110.B5" style:family="table-cell">
      <style:table-cell-properties fo:padding-left="0.212cm" fo:padding-right="0.212cm" fo:padding-top="0.141cm" fo:padding-bottom="0.141cm" fo:border="0.1pt solid #1f7272"/>
    </style:style>
    <style:style style:name="表格110.C5" style:family="table-cell">
      <style:table-cell-properties fo:padding-left="0.212cm" fo:padding-right="0.212cm" fo:padding-top="0.141cm" fo:padding-bottom="0.141cm" fo:border="0.1pt solid #1f7272"/>
    </style:style>
    <style:style style:name="表格110.A6" style:family="table-cell">
      <style:table-cell-properties fo:padding-left="0.212cm" fo:padding-right="0.212cm" fo:padding-top="0.141cm" fo:padding-bottom="0.141cm" fo:border="0.1pt solid #1f7272"/>
    </style:style>
    <style:style style:name="表格110.B6" style:family="table-cell">
      <style:table-cell-properties fo:padding-left="0.212cm" fo:padding-right="0.212cm" fo:padding-top="0.141cm" fo:padding-bottom="0.141cm" fo:border="0.1pt solid #1f7272"/>
    </style:style>
    <style:style style:name="表格110.C6" style:family="table-cell">
      <style:table-cell-properties fo:padding-left="0.212cm" fo:padding-right="0.212cm" fo:padding-top="0.141cm" fo:padding-bottom="0.141cm" fo:border="0.1pt solid #1f7272"/>
    </style:style>
    <style:style style:name="表格111" style:family="table">
      <style:table-properties style:width="16.51cm" fo:margin-left="0.002cm" fo:margin-top="0cm" fo:margin-bottom="0cm" table:align="left" style:writing-mode="page"/>
    </style:style>
    <style:style style:name="表格111.A" style:family="table-column">
      <style:table-column-properties style:column-width="3.81cm"/>
    </style:style>
    <style:style style:name="表格111.B" style:family="table-column">
      <style:table-column-properties style:column-width="4.233cm"/>
    </style:style>
    <style:style style:name="表格111.1" style:family="table-row">
      <style:table-row-properties fo:keep-together="auto"/>
    </style:style>
    <style:style style:name="表格111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111.B1" style:family="table-cell">
      <style:table-cell-properties fo:background-color="#d0eeee" fo:padding-left="0.212cm" fo:padding-right="0.212cm" fo:padding-top="0.141cm" fo:padding-bottom="0.141cm" fo:border="0.1pt solid #2e75b6">
        <style:background-image/>
      </style:table-cell-properties>
    </style:style>
    <style:style style:name="表格111.C1" style:family="table-cell">
      <style:table-cell-properties fo:background-color="#ead9f5" fo:padding-left="0.212cm" fo:padding-right="0.212cm" fo:padding-top="0.141cm" fo:padding-bottom="0.141cm" fo:border="0.1pt solid #2e75b6">
        <style:background-image/>
      </style:table-cell-properties>
    </style:style>
    <style:style style:name="表格111.A2" style:family="table-cell">
      <style:table-cell-properties fo:background-color="#f2f2f2" fo:padding-left="0.212cm" fo:padding-right="0.212cm" fo:padding-top="0.141cm" fo:padding-bottom="0.141cm" fo:border="0.1pt solid #2e75b6">
        <style:background-image/>
      </style:table-cell-properties>
    </style:style>
    <style:style style:name="表格111.B2" style:family="table-cell">
      <style:table-cell-properties fo:padding-left="0.212cm" fo:padding-right="0.212cm" fo:padding-top="0.141cm" fo:padding-bottom="0.141cm" fo:border="0.1pt solid #2e75b6"/>
    </style:style>
    <style:style style:name="表格111.C2" style:family="table-cell">
      <style:table-cell-properties fo:padding-left="0.212cm" fo:padding-right="0.212cm" fo:padding-top="0.141cm" fo:padding-bottom="0.141cm" fo:border="0.1pt solid #2e75b6"/>
    </style:style>
    <style:style style:name="表格111.D2" style:family="table-cell">
      <style:table-cell-properties fo:padding-left="0.212cm" fo:padding-right="0.212cm" fo:padding-top="0.141cm" fo:padding-bottom="0.141cm" fo:border="0.1pt solid #2e75b6"/>
    </style:style>
    <style:style style:name="表格111.B3" style:family="table-cell">
      <style:table-cell-properties fo:padding-left="0.212cm" fo:padding-right="0.212cm" fo:padding-top="0.141cm" fo:padding-bottom="0.141cm" fo:border="0.1pt solid #2e75b6"/>
    </style:style>
    <style:style style:name="表格111.C3" style:family="table-cell">
      <style:table-cell-properties fo:padding-left="0.212cm" fo:padding-right="0.212cm" fo:padding-top="0.141cm" fo:padding-bottom="0.141cm" fo:border="0.1pt solid #2e75b6"/>
    </style:style>
    <style:style style:name="表格111.D3" style:family="table-cell">
      <style:table-cell-properties fo:padding-left="0.212cm" fo:padding-right="0.212cm" fo:padding-top="0.141cm" fo:padding-bottom="0.141cm" fo:border="0.1pt solid #2e75b6"/>
    </style:style>
    <style:style style:name="表格111.B4" style:family="table-cell">
      <style:table-cell-properties fo:padding-left="0.212cm" fo:padding-right="0.212cm" fo:padding-top="0.141cm" fo:padding-bottom="0.141cm" fo:border="0.1pt solid #2e75b6"/>
    </style:style>
    <style:style style:name="表格111.C4" style:family="table-cell">
      <style:table-cell-properties fo:padding-left="0.212cm" fo:padding-right="0.212cm" fo:padding-top="0.141cm" fo:padding-bottom="0.141cm" fo:border="0.1pt solid #2e75b6"/>
    </style:style>
    <style:style style:name="表格111.D4" style:family="table-cell">
      <style:table-cell-properties fo:padding-left="0.212cm" fo:padding-right="0.212cm" fo:padding-top="0.141cm" fo:padding-bottom="0.141cm" fo:border="0.1pt solid #2e75b6"/>
    </style:style>
    <style:style style:name="表格111.B5" style:family="table-cell">
      <style:table-cell-properties fo:padding-left="0.212cm" fo:padding-right="0.212cm" fo:padding-top="0.141cm" fo:padding-bottom="0.141cm" fo:border="0.1pt solid #2e75b6"/>
    </style:style>
    <style:style style:name="表格111.C5" style:family="table-cell">
      <style:table-cell-properties fo:padding-left="0.212cm" fo:padding-right="0.212cm" fo:padding-top="0.141cm" fo:padding-bottom="0.141cm" fo:border="0.1pt solid #2e75b6"/>
    </style:style>
    <style:style style:name="表格111.D5" style:family="table-cell">
      <style:table-cell-properties fo:padding-left="0.212cm" fo:padding-right="0.212cm" fo:padding-top="0.141cm" fo:padding-bottom="0.141cm" fo:border="0.1pt solid #2e75b6"/>
    </style:style>
    <style:style style:name="表格111.B6" style:family="table-cell">
      <style:table-cell-properties fo:padding-left="0.212cm" fo:padding-right="0.212cm" fo:padding-top="0.141cm" fo:padding-bottom="0.141cm" fo:border="0.1pt solid #2e75b6"/>
    </style:style>
    <style:style style:name="表格111.C6" style:family="table-cell">
      <style:table-cell-properties fo:padding-left="0.212cm" fo:padding-right="0.212cm" fo:padding-top="0.141cm" fo:padding-bottom="0.141cm" fo:border="0.1pt solid #2e75b6"/>
    </style:style>
    <style:style style:name="表格111.D6" style:family="table-cell">
      <style:table-cell-properties fo:padding-left="0.212cm" fo:padding-right="0.212cm" fo:padding-top="0.141cm" fo:padding-bottom="0.141cm" fo:border="0.1pt solid #2e75b6"/>
    </style:style>
    <style:style style:name="表格111.B7" style:family="table-cell">
      <style:table-cell-properties fo:padding-left="0.212cm" fo:padding-right="0.212cm" fo:padding-top="0.141cm" fo:padding-bottom="0.141cm" fo:border="0.1pt solid #2e75b6"/>
    </style:style>
    <style:style style:name="表格111.C7" style:family="table-cell">
      <style:table-cell-properties fo:padding-left="0.212cm" fo:padding-right="0.212cm" fo:padding-top="0.141cm" fo:padding-bottom="0.141cm" fo:border="0.1pt solid #2e75b6"/>
    </style:style>
    <style:style style:name="表格111.D7" style:family="table-cell">
      <style:table-cell-properties fo:padding-left="0.212cm" fo:padding-right="0.212cm" fo:padding-top="0.141cm" fo:padding-bottom="0.141cm" fo:border="0.1pt solid #2e75b6"/>
    </style:style>
    <style:style style:name="表格111.B8" style:family="table-cell">
      <style:table-cell-properties fo:padding-left="0.212cm" fo:padding-right="0.212cm" fo:padding-top="0.141cm" fo:padding-bottom="0.141cm" fo:border="0.1pt solid #2e75b6"/>
    </style:style>
    <style:style style:name="表格111.C8" style:family="table-cell">
      <style:table-cell-properties fo:padding-left="0.212cm" fo:padding-right="0.212cm" fo:padding-top="0.141cm" fo:padding-bottom="0.141cm" fo:border="0.1pt solid #2e75b6"/>
    </style:style>
    <style:style style:name="表格111.D8" style:family="table-cell">
      <style:table-cell-properties fo:padding-left="0.212cm" fo:padding-right="0.212cm" fo:padding-top="0.141cm" fo:padding-bottom="0.141cm" fo:border="0.1pt solid #2e75b6"/>
    </style:style>
    <style:style style:name="表格111.B9" style:family="table-cell">
      <style:table-cell-properties fo:padding-left="0.212cm" fo:padding-right="0.212cm" fo:padding-top="0.141cm" fo:padding-bottom="0.141cm" fo:border="0.1pt solid #2e75b6"/>
    </style:style>
    <style:style style:name="表格111.C9" style:family="table-cell">
      <style:table-cell-properties fo:padding-left="0.212cm" fo:padding-right="0.212cm" fo:padding-top="0.141cm" fo:padding-bottom="0.141cm" fo:border="0.1pt solid #2e75b6"/>
    </style:style>
    <style:style style:name="表格111.D9" style:family="table-cell">
      <style:table-cell-properties fo:padding-left="0.212cm" fo:padding-right="0.212cm" fo:padding-top="0.141cm" fo:padding-bottom="0.141cm" fo:border="0.1pt solid #2e75b6"/>
    </style:style>
    <style:style style:name="表格111.B10" style:family="table-cell">
      <style:table-cell-properties fo:padding-left="0.212cm" fo:padding-right="0.212cm" fo:padding-top="0.141cm" fo:padding-bottom="0.141cm" fo:border="0.1pt solid #2e75b6"/>
    </style:style>
    <style:style style:name="表格111.C10" style:family="table-cell">
      <style:table-cell-properties fo:padding-left="0.212cm" fo:padding-right="0.212cm" fo:padding-top="0.141cm" fo:padding-bottom="0.141cm" fo:border="0.1pt solid #2e75b6"/>
    </style:style>
    <style:style style:name="表格111.D10" style:family="table-cell">
      <style:table-cell-properties fo:padding-left="0.212cm" fo:padding-right="0.212cm" fo:padding-top="0.141cm" fo:padding-bottom="0.141cm" fo:border="0.1pt solid #2e75b6"/>
    </style:style>
    <style:style style:name="表格112" style:family="table">
      <style:table-properties style:width="16.51cm" fo:margin-left="0.002cm" fo:margin-top="0cm" fo:margin-bottom="0cm" table:align="left" style:writing-mode="page"/>
    </style:style>
    <style:style style:name="表格112.A" style:family="table-column">
      <style:table-column-properties style:column-width="16.51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19" style:family="table">
      <style:table-properties style:width="16.51cm" fo:margin-left="0.002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0" style:family="table">
      <style:table-properties style:width="16.51cm" fo:margin-left="0.002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21" style:family="table">
      <style:table-properties style:width="16.51cm" fo:margin-left="0.002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2" style:family="table">
      <style:table-properties style:width="16.51cm" fo:margin-left="0.002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3" style:family="table">
      <style:table-properties style:width="16.51cm" fo:margin-left="0.002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4" style:family="table">
      <style:table-properties style:width="16.51cm" fo:margin-left="0.002cm" fo:margin-top="0cm" fo:margin-bottom="0cm" table:align="left" style:writing-mode="page"/>
    </style:style>
    <style:style style:name="表格24.A" style:family="table-column">
      <style:table-column-properties style:column-width="8.255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4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16.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25.A2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6" style:family="table">
      <style:table-properties style:width="16.51cm" fo:margin-left="0.002cm" fo:margin-top="0cm" fo:margin-bottom="0cm" table:align="left" style:writing-mode="page"/>
    </style:style>
    <style:style style:name="表格26.A" style:family="table-column">
      <style:table-column-properties style:column-width="8.255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6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27" style:family="table">
      <style:table-properties style:width="16.51cm" fo:margin-left="0.002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28" style:family="table">
      <style:table-properties style:width="16.51cm" fo:margin-left="0.002cm" fo:margin-top="0cm" fo:margin-bottom="0cm" table:align="left" style:writing-mode="page"/>
    </style:style>
    <style:style style:name="表格28.A" style:family="table-column">
      <style:table-column-properties style:column-width="5.503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28.A2" style:family="table-cell">
      <style:table-cell-properties fo:padding-left="0.212cm" fo:padding-right="0.212cm" fo:padding-top="0.141cm" fo:padding-bottom="0.141cm" fo:border="0.1pt solid #2e75b6"/>
    </style:style>
    <style:style style:name="表格28.B2" style:family="table-cell">
      <style:table-cell-properties fo:background-color="#e2efda" fo:padding-left="0.212cm" fo:padding-right="0.212cm" fo:padding-top="0.141cm" fo:padding-bottom="0.141cm" fo:border="0.1pt solid #2e75b6">
        <style:background-image/>
      </style:table-cell-properties>
    </style:style>
    <style:style style:name="表格28.C2" style:family="table-cell">
      <style:table-cell-properties fo:padding-left="0.212cm" fo:padding-right="0.212cm" fo:padding-top="0.141cm" fo:padding-bottom="0.141cm" fo:border="0.1pt solid #2e75b6"/>
    </style:style>
    <style:style style:name="表格28.A3" style:family="table-cell">
      <style:table-cell-properties fo:padding-left="0.212cm" fo:padding-right="0.212cm" fo:padding-top="0.141cm" fo:padding-bottom="0.141cm" fo:border="0.1pt solid #2e75b6"/>
    </style:style>
    <style:style style:name="表格28.C3" style:family="table-cell">
      <style:table-cell-properties fo:padding-left="0.212cm" fo:padding-right="0.212cm" fo:padding-top="0.141cm" fo:padding-bottom="0.141cm" fo:border="0.1pt solid #2e75b6"/>
    </style:style>
    <style:style style:name="表格28.A4" style:family="table-cell">
      <style:table-cell-properties fo:padding-left="0.212cm" fo:padding-right="0.212cm" fo:padding-top="0.141cm" fo:padding-bottom="0.141cm" fo:border="0.1pt solid #2e75b6"/>
    </style:style>
    <style:style style:name="表格28.B4" style:family="table-cell">
      <style:table-cell-properties fo:background-color="#fce4d6" fo:padding-left="0.212cm" fo:padding-right="0.212cm" fo:padding-top="0.141cm" fo:padding-bottom="0.141cm" fo:border="0.1pt solid #2e75b6">
        <style:background-image/>
      </style:table-cell-properties>
    </style:style>
    <style:style style:name="表格28.C4" style:family="table-cell">
      <style:table-cell-properties fo:padding-left="0.212cm" fo:padding-right="0.212cm" fo:padding-top="0.141cm" fo:padding-bottom="0.141cm" fo:border="0.1pt solid #2e75b6"/>
    </style:style>
    <style:style style:name="表格29" style:family="table">
      <style:table-properties style:width="16.51cm" fo:margin-left="0.002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30" style:family="table">
      <style:table-properties style:width="16.51cm" fo:margin-left="0.002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3" style:family="table">
      <style:table-properties style:width="16.51cm" fo:margin-left="0.002cm" fo:margin-top="0cm" fo:margin-bottom="0cm" table:align="left" style:writing-mode="page"/>
    </style:style>
    <style:style style:name="表格33.A" style:family="table-column">
      <style:table-column-properties style:column-width="8.255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3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3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1" style:family="table">
      <style:table-properties style:width="16.51cm" fo:margin-left="0.002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2" style:family="table">
      <style:table-properties style:width="16.51cm" fo:margin-left="0.002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4" style:family="table">
      <style:table-properties style:width="16.51cm" fo:margin-left="0.002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37" style:family="table">
      <style:table-properties style:width="16.51cm" fo:margin-left="0.002cm" fo:margin-top="0cm" fo:margin-bottom="0cm" table:align="left" style:writing-mode="page"/>
    </style:style>
    <style:style style:name="表格37.A" style:family="table-column">
      <style:table-column-properties style:column-width="8.255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0eeee" fo:padding-left="0.282cm" fo:padding-right="0.282cm" fo:padding-top="0.176cm" fo:padding-bottom="0.176cm" fo:border="0.1pt solid #1f7272">
        <style:background-image/>
      </style:table-cell-properties>
    </style:style>
    <style:style style:name="表格37.A2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7.B2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5" style:family="table">
      <style:table-properties style:width="16.51cm" fo:margin-left="0.002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16.51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38" style:family="table">
      <style:table-properties style:width="16.51cm" fo:margin-left="0.002cm" fo:margin-top="0cm" fo:margin-bottom="0cm" table:align="left" style:writing-mode="page"/>
    </style:style>
    <style:style style:name="表格38.A" style:family="table-column">
      <style:table-column-properties style:column-width="8.255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38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39" style:family="table">
      <style:table-properties style:width="16.51cm" fo:margin-left="0.002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d9f5" fo:padding-left="0.282cm" fo:padding-right="0.282cm" fo:padding-top="0.176cm" fo:padding-bottom="0.176cm" fo:border="0.1pt solid #6b2c91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8.255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42.B1" style:family="table-cell">
      <style:table-cell-properties fo:background-color="#ffffff" fo:padding-left="0.212cm" fo:padding-right="0.212cm" fo:padding-top="0.141cm" fo:padding-bottom="0.141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16.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1" style:family="table">
      <style:table-properties style:width="16.51cm" fo:margin-left="0.002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16.51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4" style:family="table">
      <style:table-properties style:width="16.51cm" fo:margin-left="0.002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5" style:family="table">
      <style:table-properties style:width="16.51cm" fo:margin-left="0.002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表格46" style:family="table">
      <style:table-properties style:width="16.51cm" fo:margin-left="0.002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5f8ff" fo:padding-left="0.353cm" fo:padding-right="0.353cm" fo:padding-top="0.212cm" fo:padding-bottom="0.212cm" fo:border="0.1pt solid #2e75b6">
        <style:background-image/>
      </style:table-cell-properties>
    </style:style>
    <style:style style:name="表格47" style:family="table">
      <style:table-properties style:width="16.51cm" fo:margin-left="0.002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ce4d6" fo:padding-left="0.282cm" fo:padding-right="0.282cm" fo:padding-top="0.176cm" fo:padding-bottom="0.176cm" fo:border="0.1pt solid #c55a11">
        <style:background-image/>
      </style:table-cell-properties>
    </style:style>
    <style:style style:name="表格48" style:family="table">
      <style:table-properties style:width="16.51cm" fo:margin-left="0.002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8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49" style:family="table">
      <style:table-properties style:width="16.51cm" fo:margin-left="0.002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49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0" style:family="table">
      <style:table-properties style:width="16.51cm" fo:margin-left="0.002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0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1" style:family="table">
      <style:table-properties style:width="16.51cm" fo:margin-left="0.002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fce4d6" fo:padding-left="0.282cm" fo:padding-right="0.282cm" fo:padding-top="0.141cm" fo:padding-bottom="0.141cm" fo:border="0.1pt solid #c55a11">
        <style:background-image/>
      </style:table-cell-properties>
    </style:style>
    <style:style style:name="表格51.A2" style:family="table-cell">
      <style:table-cell-properties fo:background-color="#ffffff" fo:padding-left="0.282cm" fo:padding-right="0.282cm" fo:padding-top="0.141cm" fo:padding-bottom="0.141cm" fo:border="0.1pt solid #c55a11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7.056cm"/>
    </style:style>
    <style:style style:name="表格52.B" style:family="table-column">
      <style:table-column-properties style:column-width="3.808cm"/>
    </style:style>
    <style:style style:name="表格52.C" style:family="table-column">
      <style:table-column-properties style:column-width="5.646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212cm" fo:padding-right="0.212cm" fo:padding-top="0.141cm" fo:padding-bottom="0.141cm" fo:border="0.1pt solid #2e75b6">
        <style:background-image/>
      </style:table-cell-properties>
    </style:style>
    <style:style style:name="表格52.A2" style:family="table-cell">
      <style:table-cell-properties fo:padding-left="0.212cm" fo:padding-right="0.212cm" fo:padding-top="0.141cm" fo:padding-bottom="0.141cm" fo:border="0.1pt solid #2e75b6"/>
    </style:style>
    <style:style style:name="表格52.B2" style:family="table-cell">
      <style:table-cell-properties fo:background-color="#f5f8ff" fo:padding-left="0.212cm" fo:padding-right="0.212cm" fo:padding-top="0.141cm" fo:padding-bottom="0.141cm" fo:border="0.1pt solid #2e75b6">
        <style:background-image/>
      </style:table-cell-properties>
    </style:style>
    <style:style style:name="表格52.C2" style:family="table-cell">
      <style:table-cell-properties fo:padding-left="0.212cm" fo:padding-right="0.212cm" fo:padding-top="0.141cm" fo:padding-bottom="0.141cm" fo:border="0.1pt solid #2e75b6"/>
    </style:style>
    <style:style style:name="表格52.A3" style:family="table-cell">
      <style:table-cell-properties fo:padding-left="0.212cm" fo:padding-right="0.212cm" fo:padding-top="0.141cm" fo:padding-bottom="0.141cm" fo:border="0.1pt solid #2e75b6"/>
    </style:style>
    <style:style style:name="表格52.C3" style:family="table-cell">
      <style:table-cell-properties fo:padding-left="0.212cm" fo:padding-right="0.212cm" fo:padding-top="0.141cm" fo:padding-bottom="0.141cm" fo:border="0.1pt solid #2e75b6"/>
    </style:style>
    <style:style style:name="表格52.A4" style:family="table-cell">
      <style:table-cell-properties fo:padding-left="0.212cm" fo:padding-right="0.212cm" fo:padding-top="0.141cm" fo:padding-bottom="0.141cm" fo:border="0.1pt solid #2e75b6"/>
    </style:style>
    <style:style style:name="表格52.C4" style:family="table-cell">
      <style:table-cell-properties fo:padding-left="0.212cm" fo:padding-right="0.212cm" fo:padding-top="0.141cm" fo:padding-bottom="0.141cm" fo:border="0.1pt solid #2e75b6"/>
    </style:style>
    <style:style style:name="表格52.A5" style:family="table-cell">
      <style:table-cell-properties fo:padding-left="0.212cm" fo:padding-right="0.212cm" fo:padding-top="0.141cm" fo:padding-bottom="0.141cm" fo:border="0.1pt solid #2e75b6"/>
    </style:style>
    <style:style style:name="表格52.C5" style:family="table-cell">
      <style:table-cell-properties fo:padding-left="0.212cm" fo:padding-right="0.212cm" fo:padding-top="0.141cm" fo:padding-bottom="0.141cm" fo:border="0.1pt solid #2e75b6"/>
    </style:style>
    <style:style style:name="表格52.A6" style:family="table-cell">
      <style:table-cell-properties fo:padding-left="0.212cm" fo:padding-right="0.212cm" fo:padding-top="0.141cm" fo:padding-bottom="0.141cm" fo:border="0.1pt solid #2e75b6"/>
    </style:style>
    <style:style style:name="表格52.C6" style:family="table-cell">
      <style:table-cell-properties fo:padding-left="0.212cm" fo:padding-right="0.212cm" fo:padding-top="0.141cm" fo:padding-bottom="0.141cm" fo:border="0.1pt solid #2e75b6"/>
    </style:style>
    <style:style style:name="表格52.A7" style:family="table-cell">
      <style:table-cell-properties fo:padding-left="0.212cm" fo:padding-right="0.212cm" fo:padding-top="0.141cm" fo:padding-bottom="0.141cm" fo:border="0.1pt solid #2e75b6"/>
    </style:style>
    <style:style style:name="表格52.C7" style:family="table-cell">
      <style:table-cell-properties fo:padding-left="0.212cm" fo:padding-right="0.212cm" fo:padding-top="0.141cm" fo:padding-bottom="0.141cm" fo:border="0.1pt solid #2e75b6"/>
    </style:style>
    <style:style style:name="表格52.A8" style:family="table-cell">
      <style:table-cell-properties fo:padding-left="0.212cm" fo:padding-right="0.212cm" fo:padding-top="0.141cm" fo:padding-bottom="0.141cm" fo:border="0.1pt solid #2e75b6"/>
    </style:style>
    <style:style style:name="表格52.C8" style:family="table-cell">
      <style:table-cell-properties fo:padding-left="0.212cm" fo:padding-right="0.212cm" fo:padding-top="0.141cm" fo:padding-bottom="0.141cm" fo:border="0.1pt solid #2e75b6"/>
    </style:style>
    <style:style style:name="表格52.A9" style:family="table-cell">
      <style:table-cell-properties fo:padding-left="0.212cm" fo:padding-right="0.212cm" fo:padding-top="0.141cm" fo:padding-bottom="0.141cm" fo:border="0.1pt solid #2e75b6"/>
    </style:style>
    <style:style style:name="表格52.C9" style:family="table-cell">
      <style:table-cell-properties fo:padding-left="0.212cm" fo:padding-right="0.212cm" fo:padding-top="0.141cm" fo:padding-bottom="0.141cm" fo:border="0.1pt solid #2e75b6"/>
    </style:style>
    <style:style style:name="表格53" style:family="table">
      <style:table-properties style:width="16.51cm" fo:margin-left="0.002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2efda" fo:padding-left="0.282cm" fo:padding-right="0.282cm" fo:padding-top="0.176cm" fo:padding-bottom="0.176cm" fo:border="0.1pt solid #375623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16.51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282cm" fo:padding-right="0.282cm" fo:padding-top="0.176cm" fo:padding-bottom="0.176cm" fo:border="0.1pt solid #2e75b6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/>
      <style:text-properties fo:color="#2e75b6" loext:opacity="100%" style:font-name="Arial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P3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P4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13f42e" style:font-name-asian="Arial3" style:font-size-asian="13pt" style:font-weight-asian="bold" style:font-name-complex="Arial3" style:font-size-complex="13pt" style:font-weight-complex="bold"/>
    </style:style>
    <style:style style:name="P5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29de2" style:font-name-asian="Arial3" style:font-size-asian="13pt" style:font-weight-asian="bold" style:font-name-complex="Arial3" style:font-size-complex="13pt" style:font-weight-complex="bold"/>
    </style:style>
    <style:style style:name="P6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7" style:family="paragraph" style:parent-style-name="Heading_20_2">
      <loext:graphic-properties draw:fill="solid" draw:fill-color="#18ffff" draw:opacity="100%"/>
      <style:paragraph-properties fo:margin-top="0.423cm" fo:margin-bottom="0.212cm" style:contextual-spacing="false" fo:background-color="#18ffff"/>
      <style:text-properties fo:color="#2e75b6" loext:opacity="100%" style:font-name="Arial" fo:font-size="13pt" fo:font-weight="bold" officeooo:paragraph-rsid="00549b67" style:font-name-asian="Arial3" style:font-size-asian="13pt" style:font-weight-asian="bold" style:font-name-complex="Arial3" style:font-size-complex="13pt" style:font-weight-complex="bold"/>
    </style:style>
    <style:style style:name="P8" style:family="paragraph" style:parent-style-name="Heading_20_2">
      <style:paragraph-properties fo:margin-top="0.423cm" fo:margin-bottom="0.212cm" style:contextual-spacing="false"/>
      <style:text-properties fo:color="#2e75b6" loext:opacity="100%" style:font-name="Arial" fo:font-size="13pt" fo:font-weight="bold" officeooo:paragraph-rsid="00ac94f7" style:font-name-asian="Arial3" style:font-size-asian="13pt" style:font-weight-asian="bold" style:font-name-complex="Arial3" style:font-size-complex="13pt" style:font-weight-complex="bold"/>
    </style:style>
    <style:style style:name="P9" style:family="paragraph" style:parent-style-name="Standard">
      <style:text-properties fo:color="#2e75b6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P11" style:family="paragraph" style:parent-style-name="Standard">
      <style:paragraph-properties fo:margin-top="0.071cm" fo:margin-bottom="0.071cm" style:contextual-spacing="false"/>
    </style:style>
    <style:style style:name="P12" style:family="paragraph" style:parent-style-name="Standard">
      <style:paragraph-properties fo:margin-top="0cm" fo:margin-bottom="0.212cm" style:contextual-spacing="false" fo:text-align="center" style:justify-single-word="false"/>
      <style:text-properties fo:color="#1f4e79" loext:opacity="100%" style:font-name="Arial" fo:font-size="28pt" fo:font-weight="bold" style:font-name-asian="Arial3" style:font-size-asian="28pt" style:font-weight-asian="bold" style:font-name-complex="Arial3" style:font-size-complex="28pt" style:font-weight-complex="bold"/>
    </style:style>
    <style:style style:name="P13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4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13f42e" style:font-name-asian="Arial3" style:font-size-asian="11pt" style:font-name-complex="Arial3" style:font-size-complex="11pt"/>
    </style:style>
    <style:style style:name="P15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29de2" style:font-name-asian="Arial3" style:font-size-asian="11pt" style:font-name-complex="Arial3" style:font-size-complex="11pt"/>
    </style:style>
    <style:style style:name="P16" style:family="paragraph" style:parent-style-name="Standard">
      <style:paragraph-properties fo:margin-top="0.088cm" fo:margin-bottom="0.088cm" style:contextual-spacing="false"/>
      <style:text-properties fo:color="#1f4e79" loext:opacity="100%" style:font-name="Arial" fo:font-size="11pt" officeooo:paragraph-rsid="00549b67" style:font-name-asian="Arial3" style:font-size-asian="11pt" style:font-name-complex="Arial3" style:font-size-complex="11pt"/>
    </style:style>
    <style:style style:name="P17" style:family="paragraph" style:parent-style-name="Standard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18" style:family="paragraph" style:parent-style-name="Standard">
      <style:text-properties fo:color="#1f4e79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19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20" style:family="paragraph" style:parent-style-name="Standard">
      <style:paragraph-properties fo:margin-top="0.106cm" fo:margin-bottom="0.106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1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22" style:family="paragraph" style:parent-style-name="Standard">
      <style:paragraph-properties fo:margin-top="0.141cm" fo:margin-bottom="0.141cm" style:contextual-spacing="false"/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23" style:family="paragraph" style:parent-style-name="Standard">
      <style:text-properties fo:color="#1f4e79" loext:opacity="100%" style:font-name="Arial" fo:font-size="11pt" fo:font-weight="bold" fo:background-color="#ffc400" style:font-name-asian="Arial3" style:font-size-asian="11pt" style:font-weight-asian="bold" style:font-name-complex="Arial3" style:font-size-complex="11pt" style:font-weight-complex="bold"/>
    </style:style>
    <style:style style:name="P24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25" style:family="paragraph" style:parent-style-name="Heading_20_1">
      <style:paragraph-properties fo:margin-top="0cm" fo:margin-bottom="0.282cm" style:contextual-spacing="false" fo:break-before="page" fo:padding-left="0cm" fo:padding-right="0cm" fo:padding-top="0cm" fo:padding-bottom="0.141cm" fo:border-left="none" fo:border-right="none" fo:border-top="none" fo:border-bottom="0.99pt solid #2e75b6"/>
      <style:text-properties fo:color="#1f4e79" loext:opacity="100%" style:font-name="Arial" fo:font-size="16pt" fo:font-weight="bold" officeooo:paragraph-rsid="00549b67" style:font-name-asian="Arial3" style:font-size-asian="16pt" style:font-weight-asian="bold" style:font-name-complex="Arial3" style:font-size-complex="16pt" style:font-weight-complex="bold"/>
    </style:style>
    <style:style style:name="P26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P27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13f42e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margin-top="0.071cm" fo:margin-bottom="0.071cm" style:contextual-spacing="false"/>
      <style:text-properties fo:color="#1f4e79" loext:opacity="100%" style:font-name="Courier New" fo:font-size="10pt" officeooo:paragraph-rsid="00446bf2" style:font-name-asian="Courier New1" style:font-size-asian="10pt" style:font-name-complex="Courier New1" style:font-size-complex="10pt"/>
    </style:style>
    <style:style style:name="P29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29de2" style:font-name-asian="Courier New1" style:font-size-asian="10pt" style:font-name-complex="Courier New1" style:font-size-complex="10pt"/>
    </style:style>
    <style:style style:name="P30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549b67" style:font-name-asian="Courier New1" style:font-size-asian="10pt" style:font-name-complex="Courier New1" style:font-size-complex="10pt"/>
    </style:style>
    <style:style style:name="P31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ac94f7" style:font-name-asian="Courier New1" style:font-size-asian="10pt" style:font-name-complex="Courier New1" style:font-size-complex="10pt"/>
    </style:style>
    <style:style style:name="P32" style:family="paragraph" style:parent-style-name="Standard">
      <style:text-properties fo:color="#1f4e79" loext:opacity="100%" style:font-name="Courier New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P33" style:family="paragraph" style:parent-style-name="Standard">
      <style:paragraph-properties fo:margin-top="0cm" fo:margin-bottom="0.071cm" style:contextual-spacing="false" fo:text-align="center" style:justify-single-word="false"/>
      <style:text-properties fo:color="#595959" loext:opacity="100%" style:font-name="Arial" fo:font-size="12pt" style:font-name-asian="Arial3" style:font-size-asian="12pt" style:font-name-complex="Arial3" style:font-size-complex="12pt"/>
    </style:style>
    <style:style style:name="P34" style:family="paragraph" style:parent-style-name="Standard">
      <style:paragraph-properties fo:margin-top="0.106cm" fo:margin-bottom="0.106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5" style:family="paragraph" style:parent-style-name="Standard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6" style:family="paragraph" style:parent-style-name="Standard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37" style:family="paragraph" style:parent-style-name="Standard">
      <style:paragraph-properties fo:text-align="center" style:justify-single-word="false"/>
      <style:text-properties fo:color="#595959" loext:opacity="100%" style:font-name="Arial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P38" style:family="paragraph" style:parent-style-name="Standard">
      <style:paragraph-properties fo:margin-top="0.088cm" fo:margin-bottom="0.088cm" style:contextual-spacing="false"/>
    </style:style>
    <style:style style:name="P39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style:font-name-asian="Arial3" style:font-size-asian="11pt" style:font-name-complex="Arial3" style:font-size-complex="11pt"/>
    </style:style>
    <style:style style:name="P40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13f42e" style:font-name-asian="Arial3" style:font-size-asian="11pt" style:font-name-complex="Arial3" style:font-size-complex="11pt"/>
    </style:style>
    <style:style style:name="P41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29de2" style:font-name-asian="Arial3" style:font-size-asian="11pt" style:font-name-complex="Arial3" style:font-size-complex="11pt"/>
    </style:style>
    <style:style style:name="P42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549b67" style:font-name-asian="Arial3" style:font-size-asian="11pt" style:font-name-complex="Arial3" style:font-size-complex="11pt"/>
    </style:style>
    <style:style style:name="P43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ac94f7" style:font-name-asian="Arial3" style:font-size-asian="11pt" style:font-name-complex="Arial3" style:font-size-complex="11pt"/>
    </style:style>
    <style:style style:name="P44" style:family="paragraph" style:parent-style-name="Standard">
      <style:text-properties fo:color="#c55a11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5" style:family="paragraph" style:parent-style-name="Standard">
      <style:paragraph-properties fo:margin-top="0.282cm" fo:margin-bottom="0.141cm" style:contextual-spacing="false"/>
      <style:text-properties fo:color="#c55a11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46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47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48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49" style:family="paragraph" style:parent-style-name="Standard">
      <style:text-properties fo:color="#375623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0" style:family="paragraph" style:parent-style-name="Standard">
      <style:text-properties fo:color="#375623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51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13f42e" style:font-name-asian="Arial3" style:font-size-asian="11pt" style:font-name-complex="Arial3" style:font-size-complex="11pt"/>
    </style:style>
    <style:style style:name="P52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P53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29de2" style:font-name-asian="Arial3" style:font-size-asian="11pt" style:font-name-complex="Arial3" style:font-size-complex="11pt"/>
    </style:style>
    <style:style style:name="P54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549b67" style:font-name-asian="Arial3" style:font-size-asian="11pt" style:font-name-complex="Arial3" style:font-size-complex="11pt"/>
    </style:style>
    <style:style style:name="P55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fo:background-color="#ffff00" style:font-name-asian="Arial3" style:font-size-asian="11pt" style:font-name-complex="Arial3" style:font-size-complex="11pt"/>
    </style:style>
    <style:style style:name="P56" style:family="paragraph" style:parent-style-name="Standard">
      <style:text-properties fo:color="#375623" loext:opacity="100%" style:font-name="Courier New" fo:font-size="10.5pt" fo:font-weight="bold" officeooo:paragraph-rsid="00529de2" style:font-name-asian="Courier New1" style:font-size-asian="10.5pt" style:font-weight-asian="bold" style:font-name-complex="Courier New1" style:font-size-complex="10.5pt" style:font-weight-complex="bold"/>
    </style:style>
    <style:style style:name="P57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58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29de2" style:font-name-asian="Arial3" style:font-size-asian="11pt" style:font-weight-asian="bold" style:font-name-complex="Arial3" style:font-size-complex="11pt" style:font-weight-complex="bold"/>
    </style:style>
    <style:style style:name="P59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60" style:family="paragraph" style:parent-style-name="Standard">
      <style:text-properties fo:color="#c00000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1" style:family="paragraph" style:parent-style-name="Standard">
      <style:paragraph-properties fo:margin-top="0.106cm" fo:margin-bottom="0.106cm" style:contextual-spacing="false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62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c00000" loext:opacity="100%" style:font-name="Arial" fo:font-size="11pt" officeooo:paragraph-rsid="00529de2" style:font-name-asian="Arial3" style:font-size-asian="11pt" style:font-name-complex="Arial3" style:font-size-complex="11pt"/>
    </style:style>
    <style:style style:name="P63" style:family="paragraph" style:parent-style-name="Standard">
      <style:text-properties fo:color="#c00000" loext:opacity="100%" style:font-name="Courier New" fo:font-size="10.5pt" fo:font-weight="bold" officeooo:paragraph-rsid="00529de2" fo:background-color="#ffd740" style:font-name-asian="Courier New1" style:font-size-asian="10.5pt" style:font-weight-asian="bold" style:font-name-complex="Courier New1" style:font-size-complex="10.5pt" style:font-weight-complex="bold"/>
    </style:style>
    <style:style style:name="P64" style:family="paragraph" style:parent-style-name="Standard">
      <style:paragraph-properties fo:margin-top="0.071cm" fo:margin-bottom="0.071cm" style:contextual-spacing="false"/>
      <style:text-properties officeooo:paragraph-rsid="0013f42e"/>
    </style:style>
    <style:style style:name="P65" style:family="paragraph" style:parent-style-name="Standard">
      <style:paragraph-properties fo:margin-top="0.088cm" fo:margin-bottom="0.088cm" style:contextual-spacing="false"/>
      <style:text-properties officeooo:paragraph-rsid="0013f42e"/>
    </style:style>
    <style:style style:name="P66" style:family="paragraph" style:parent-style-name="Standard">
      <style:paragraph-properties fo:margin-top="0.064cm" fo:margin-bottom="0.064cm" style:contextual-spacing="false"/>
      <style:text-properties officeooo:paragraph-rsid="0013f42e"/>
    </style:style>
    <style:style style:name="P67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13f42e" style:font-name-asian="Arial3" style:font-size-asian="12pt" style:font-weight-asian="bold" style:font-name-complex="Arial3" style:font-size-complex="12pt" style:font-weight-complex="bold"/>
    </style:style>
    <style:style style:name="P68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69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29de2" style:font-name-asian="Arial3" style:font-size-asian="12pt" style:font-weight-asian="bold" style:font-name-complex="Arial3" style:font-size-complex="12pt" style:font-weight-complex="bold"/>
    </style:style>
    <style:style style:name="P70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549b67" style:font-name-asian="Arial3" style:font-size-asian="12pt" style:font-weight-asian="bold" style:font-name-complex="Arial3" style:font-size-complex="12pt" style:font-weight-complex="bold"/>
    </style:style>
    <style:style style:name="P71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ac94f7" style:font-name-asian="Arial3" style:font-size-asian="12pt" style:font-weight-asian="bold" style:font-name-complex="Arial3" style:font-size-complex="12pt" style:font-weight-complex="bold"/>
    </style:style>
    <style:style style:name="P72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29de2" style:font-name-asian="Arial3" style:font-size-asian="11pt" style:font-name-complex="Arial3" style:font-size-complex="11pt"/>
    </style:style>
    <style:style style:name="P73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officeooo:paragraph-rsid="00549b67" style:font-name-asian="Arial3" style:font-size-asian="11pt" style:font-name-complex="Arial3" style:font-size-complex="11pt"/>
    </style:style>
    <style:style style:name="P74" style:family="paragraph" style:parent-style-name="Standard">
      <style:paragraph-properties fo:margin-top="0.088cm" fo:margin-bottom="0.088cm" style:contextual-spacing="false"/>
      <style:text-properties fo:color="#1f7272" loext:opacity="100%" style:font-name="Arial" fo:font-size="11pt" style:font-name-asian="Arial3" style:font-size-asian="11pt" style:font-name-complex="Arial3" style:font-size-complex="11pt"/>
    </style:style>
    <style:style style:name="P75" style:family="paragraph" style:parent-style-name="Standard"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6" style:family="paragraph" style:parent-style-name="Standard">
      <style:paragraph-properties fo:margin-top="0.106cm" fo:margin-bottom="0.106cm" style:contextual-spacing="false"/>
      <style:text-properties fo:color="#1f7272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77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78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79" style:family="paragraph" style:parent-style-name="Standard">
      <style:text-properties fo:color="#404040" loext:opacity="100%" style:font-name="Arial" fo:font-size="11pt" officeooo:paragraph-rsid="0013f42e" style:font-name-asian="Arial3" style:font-size-asian="11pt" style:font-name-complex="Arial3" style:font-size-complex="11pt"/>
    </style:style>
    <style:style style:name="P80" style:family="paragraph" style:parent-style-name="Standard">
      <style:paragraph-properties fo:margin-top="0.088cm" fo:margin-bottom="0.088cm" style:contextual-spacing="false"/>
      <style:text-properties fo:color="#404040" loext:opacity="100%" style:font-name="Arial" fo:font-size="11pt" officeooo:paragraph-rsid="0021ef30" style:font-name-asian="Arial3" style:font-size-asian="11pt" style:font-name-complex="Arial3" style:font-size-complex="11pt"/>
    </style:style>
    <style:style style:name="P8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29de2" style:font-name-asian="Arial3" style:font-size-asian="11pt" style:font-name-complex="Arial3" style:font-size-complex="11pt"/>
    </style:style>
    <style:style style:name="P82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83" style:family="paragraph" style:parent-style-name="Standard">
      <loext:graphic-properties draw:fill="solid" draw:fill-color="#18ffff" draw:opacity="100%"/>
      <style:paragraph-properties fo:margin-top="0.106cm" fo:margin-bottom="0.106cm" style:contextual-spacing="false" fo:background-color="#18ffff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84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style:font-name-asian="Arial3" style:font-size-asian="11pt" style:font-name-complex="Arial3" style:font-size-complex="11pt"/>
    </style:style>
    <style:style style:name="P85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ffff00" style:font-name-asian="Arial3" style:font-size-asian="11pt" style:font-name-complex="Arial3" style:font-size-complex="11pt"/>
    </style:style>
    <style:style style:name="P86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ac94f7" fo:background-color="#ffff00" style:font-name-asian="Arial3" style:font-size-asian="11pt" style:font-name-complex="Arial3" style:font-size-complex="11pt"/>
    </style:style>
    <style:style style:name="P87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549b67" fo:background-color="#64ffda" style:font-name-asian="Arial3" style:font-size-asian="11pt" style:font-name-complex="Arial3" style:font-size-complex="11pt"/>
    </style:style>
    <style:style style:name="P88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officeooo:paragraph-rsid="0013f42e" style:font-name-asian="Arial3" style:font-size-asian="11pt" style:font-weight-asian="bold" style:font-name-complex="Arial3" style:font-size-complex="11pt" style:font-weight-complex="bold"/>
    </style:style>
    <style:style style:name="P89" style:family="paragraph" style:parent-style-name="Standard">
      <style:paragraph-properties fo:margin-top="0.088cm" fo:margin-bottom="0.088cm" style:contextual-spacing="false"/>
      <style:text-properties fo:font-weight="bold" officeooo:paragraph-rsid="0013f42e" style:font-weight-asian="bold" style:font-weight-complex="bold"/>
    </style:style>
    <style:style style:name="P90" style:family="paragraph" style:parent-style-name="Standard">
      <style:text-properties fo:color="#76ff03" loext:opacity="100%" style:font-name="Arial" fo:font-size="11pt" fo:font-weight="bold" officeooo:paragraph-rsid="0013f42e" fo:background-color="#5d4037" style:font-name-asian="Arial3" style:font-size-asian="11pt" style:font-weight-asian="bold" style:font-name-complex="Arial3" style:font-size-complex="11pt" style:font-weight-complex="bold"/>
    </style:style>
    <style:style style:name="P91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549b67" fo:background-color="#5d4037" style:font-name-asian="Arial3" style:font-size-asian="11pt" style:font-weight-asian="bold" style:font-name-complex="Arial3" style:font-size-complex="11pt" style:font-weight-complex="bold"/>
    </style:style>
    <style:style style:name="P92" style:family="paragraph" style:parent-style-name="Standard">
      <style:paragraph-properties fo:margin-top="0.088cm" fo:margin-bottom="0.088cm" style:contextual-spacing="false"/>
      <style:text-properties fo:color="#76ff03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93" style:family="paragraph" style:parent-style-name="Standard">
      <style:paragraph-properties fo:margin-top="0.071cm" fo:margin-bottom="0.071cm" style:contextual-spacing="false"/>
      <style:text-properties officeooo:paragraph-rsid="00529de2"/>
    </style:style>
    <style:style style:name="P94" style:family="paragraph" style:parent-style-name="Standard">
      <style:paragraph-properties fo:margin-top="0.064cm" fo:margin-bottom="0.064cm" style:contextual-spacing="false"/>
      <style:text-properties officeooo:paragraph-rsid="00529de2"/>
    </style:style>
    <style:style style:name="P95" style:family="paragraph" style:parent-style-name="Standard">
      <style:text-properties officeooo:paragraph-rsid="00529de2"/>
    </style:style>
    <style:style style:name="P96" style:family="paragraph" style:parent-style-name="Standard">
      <style:paragraph-properties fo:margin-top="0.088cm" fo:margin-bottom="0.088cm" style:contextual-spacing="false"/>
      <style:text-properties officeooo:paragraph-rsid="00529de2"/>
    </style:style>
    <style:style style:name="P97" style:family="paragraph" style:parent-style-name="Standard">
      <style:paragraph-properties fo:margin-top="0.106cm" fo:margin-bottom="0.106cm" style:contextual-spacing="false"/>
      <style:text-properties officeooo:paragraph-rsid="00529de2"/>
    </style:style>
    <style:style style:name="P98" style:family="paragraph" style:parent-style-name="Standard">
      <style:paragraph-properties fo:margin-top="0.423cm" fo:margin-bottom="0.212cm" style:contextual-spacing="false"/>
      <style:text-properties officeooo:paragraph-rsid="00529de2"/>
    </style:style>
    <style:style style:name="P99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29de2" style:font-name-asian="Arial3" style:font-size-asian="11pt" style:font-name-complex="Arial3" style:font-size-complex="11pt"/>
    </style:style>
    <style:style style:name="P100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01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fo:color="#5b2c6f" loext:opacity="100%" style:font-name="Arial" fo:font-size="11pt" officeooo:paragraph-rsid="00549b67" style:font-name-asian="Arial3" style:font-size-asian="11pt" style:font-name-complex="Arial3" style:font-size-complex="11pt"/>
    </style:style>
    <style:style style:name="P102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style:font-name-asian="Arial3" style:font-size-asian="11pt" style:font-name-complex="Arial3" style:font-size-complex="11pt"/>
    </style:style>
    <style:style style:name="P103" style:family="paragraph" style:parent-style-name="Standard">
      <style:paragraph-properties fo:text-align="center" style:justify-single-word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04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549b67" style:font-name-asian="Arial3" style:font-size-asian="11pt" style:font-weight-asian="bold" style:font-name-complex="Arial3" style:font-size-complex="11pt" style:font-weight-complex="bold"/>
    </style:style>
    <style:style style:name="P105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06" style:family="paragraph" style:parent-style-name="Standard">
      <style:text-properties fo:color="#5b2c6f" loext:opacity="100%" style:font-name="Arial" fo:font-size="11pt" fo:font-weight="bold" officeooo:paragraph-rsid="00ac94f7" style:font-name-asian="Arial3" style:font-size-asian="11pt" style:font-weight-asian="bold" style:font-name-complex="Arial3" style:font-size-complex="11pt" style:font-weight-complex="bold"/>
    </style:style>
    <style:style style:name="P107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ac94f7" fo:background-color="#64ffda" style:font-name-asian="Arial3" style:font-size-asian="11pt" style:font-name-complex="Arial3" style:font-size-complex="11pt"/>
    </style:style>
    <style:style style:name="P108" style:family="paragraph" style:parent-style-name="Standard">
      <style:paragraph-properties fo:margin-top="0.071cm" fo:margin-bottom="0.071cm" style:contextual-spacing="false"/>
      <style:text-properties officeooo:paragraph-rsid="00549b67"/>
    </style:style>
    <style:style style:name="P109" style:family="paragraph" style:parent-style-name="Standard">
      <loext:graphic-properties draw:fill="solid" draw:fill-color="#18ffff" draw:opacity="100%"/>
      <style:paragraph-properties fo:margin-top="0.071cm" fo:margin-bottom="0.071cm" style:contextual-spacing="false" fo:background-color="#18ffff"/>
      <style:text-properties officeooo:paragraph-rsid="00549b67"/>
    </style:style>
    <style:style style:name="P110" style:family="paragraph" style:parent-style-name="Standard">
      <style:text-properties officeooo:paragraph-rsid="00549b67"/>
    </style:style>
    <style:style style:name="P111" style:family="paragraph" style:parent-style-name="Standard">
      <style:paragraph-properties fo:margin-top="0.088cm" fo:margin-bottom="0.088cm" style:contextual-spacing="false"/>
      <style:text-properties officeooo:paragraph-rsid="00549b67"/>
    </style:style>
    <style:style style:name="P112" style:family="paragraph" style:parent-style-name="Standard">
      <loext:graphic-properties draw:fill="solid" draw:fill-color="#18ffff" draw:opacity="100%"/>
      <style:paragraph-properties fo:margin-top="0.088cm" fo:margin-bottom="0.088cm" style:contextual-spacing="false" fo:background-color="#18ffff"/>
      <style:text-properties officeooo:paragraph-rsid="00549b67"/>
    </style:style>
    <style:style style:name="P113" style:family="paragraph" style:parent-style-name="Standard">
      <style:paragraph-properties fo:margin-top="0.064cm" fo:margin-bottom="0.064cm" style:contextual-spacing="false"/>
      <style:text-properties officeooo:paragraph-rsid="00549b67"/>
    </style:style>
    <style:style style:name="P114" style:family="paragraph" style:parent-style-name="Heading_20_2">
      <style:paragraph-properties fo:margin-top="0.423cm" fo:margin-bottom="0.212cm" style:contextual-spacing="false"/>
      <style:text-properties officeooo:paragraph-rsid="00549b67"/>
    </style:style>
    <style:style style:name="P115" style:family="paragraph" style:parent-style-name="Standard">
      <style:paragraph-properties fo:margin-top="0.423cm" fo:margin-bottom="0.212cm" style:contextual-spacing="false"/>
      <style:text-properties officeooo:paragraph-rsid="00549b67"/>
    </style:style>
    <style:style style:name="P116" style:family="paragraph" style:parent-style-name="Standard">
      <style:paragraph-properties fo:margin-top="0.088cm" fo:margin-bottom="0.088cm" style:contextual-spacing="false"/>
      <style:text-properties fo:color="#eeff41" loext:opacity="100%" style:font-name="Arial" fo:font-size="11pt" fo:font-weight="bold" officeooo:paragraph-rsid="00549b67" fo:background-color="#f50057" style:font-name-asian="Arial3" style:font-size-asian="11pt" style:font-weight-asian="bold" style:font-name-complex="Arial3" style:font-size-complex="11pt" style:font-weight-complex="bold"/>
    </style:style>
    <style:style style:name="P117" style:family="paragraph" style:parent-style-name="Heading_20_2">
      <style:paragraph-properties fo:margin-top="0.423cm" fo:margin-bottom="0.212cm" style:contextual-spacing="false"/>
    </style:style>
    <style:style style:name="P118" style:family="paragraph" style:parent-style-name="Standard">
      <style:paragraph-properties fo:margin-top="0.088cm" fo:margin-bottom="0.088cm" style:contextual-spacing="false"/>
      <style:text-properties fo:color="#6b2c91" loext:opacity="100%" style:font-name="Arial" fo:font-size="11pt" style:font-name-asian="Arial3" style:font-size-asian="11pt" style:font-name-complex="Arial3" style:font-size-complex="11pt"/>
    </style:style>
    <style:style style:name="P119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549b67" fo:background-color="#ff5252" style:font-name-asian="Arial3" style:font-size-asian="11pt" style:font-weight-asian="bold" style:font-name-complex="Arial3" style:font-size-complex="11pt" style:font-weight-complex="bold"/>
    </style:style>
    <style:style style:name="P120" style:family="paragraph" style:parent-style-name="Standard">
      <style:paragraph-properties fo:margin-top="0.088cm" fo:margin-bottom="0.088cm" style:contextual-spacing="false"/>
      <style:text-properties fo:color="#ffff00" loext:opacity="100%" style:font-name="Arial" fo:font-size="11pt" fo:font-weight="bold" officeooo:paragraph-rsid="00ac94f7" fo:background-color="#000000" style:font-name-asian="Arial3" style:font-size-asian="11pt" style:font-weight-asian="bold" style:font-name-complex="Arial3" style:font-size-complex="11pt" style:font-weight-complex="bold"/>
    </style:style>
    <style:style style:name="P121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549b67" fo:background-color="#d500f9" style:font-name-asian="Arial3" style:font-size-asian="11pt" style:font-weight-asian="bold" style:font-name-complex="Arial3" style:font-size-complex="11pt" style:font-weight-complex="bold"/>
    </style:style>
    <style:style style:name="P122" style:family="paragraph" style:parent-style-name="Standard">
      <style:paragraph-properties fo:margin-top="0.071cm" fo:margin-bottom="0.071cm" style:contextual-spacing="false"/>
      <style:text-properties officeooo:paragraph-rsid="00ac94f7"/>
    </style:style>
    <style:style style:name="P123" style:family="paragraph" style:parent-style-name="Standard">
      <style:paragraph-properties fo:margin-top="0.088cm" fo:margin-bottom="0.088cm" style:contextual-spacing="false"/>
      <style:text-properties officeooo:paragraph-rsid="00ac94f7"/>
    </style:style>
    <style:style style:name="P124" style:family="paragraph" style:parent-style-name="Standard">
      <style:paragraph-properties fo:margin-top="0.064cm" fo:margin-bottom="0.064cm" style:contextual-spacing="false"/>
      <style:text-properties officeooo:paragraph-rsid="00ac94f7"/>
    </style:style>
    <style:style style:name="P125" style:family="paragraph" style:parent-style-name="Standard">
      <style:paragraph-properties fo:margin-top="0.071cm" fo:margin-bottom="0.071cm" style:contextual-spacing="false"/>
      <style:text-properties officeooo:paragraph-rsid="00d1b50e"/>
    </style:style>
    <style:style style:name="P126" style:family="paragraph" style:parent-style-name="Standard">
      <style:paragraph-properties fo:margin-top="0.088cm" fo:margin-bottom="0.088cm" style:contextual-spacing="false"/>
      <style:text-properties officeooo:paragraph-rsid="00d1b50e"/>
    </style:style>
    <style:style style:name="P127" style:family="paragraph" style:parent-style-name="Standard">
      <style:paragraph-properties fo:margin-top="0.064cm" fo:margin-bottom="0.064cm" style:contextual-spacing="false"/>
      <style:text-properties officeooo:paragraph-rsid="00d1b50e"/>
    </style:style>
    <style:style style:name="P128" style:family="paragraph" style:parent-style-name="Standard">
      <style:text-properties officeooo:paragraph-rsid="00d1b50e"/>
    </style:style>
    <style:style style:name="P129" style:family="paragraph" style:parent-style-name="List_20_Paragraph" style:list-style-name="WWNum2">
      <style:paragraph-properties fo:margin-top="0.088cm" fo:margin-bottom="0.088cm" style:contextual-spacing="false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30" style:family="paragraph" style:parent-style-name="List_20_Paragraph" style:list-style-name="WWNum3">
      <style:paragraph-properties fo:margin-top="0.088cm" fo:margin-bottom="0.088cm" style:contextual-spacing="false"/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P131" style:family="paragraph" style:parent-style-name="List_20_Paragraph" style:list-style-name="WWNum3">
      <style:paragraph-properties fo:margin-top="0.088cm" fo:margin-bottom="0.088cm" style:contextual-spacing="false"/>
      <style:text-properties fo:color="#1f4e79" loext:opacity="100%" style:font-name="Arial" fo:font-size="11pt" style:font-name-asian="Arial3" style:font-size-asian="11pt" style:font-name-complex="Arial3" style:font-size-complex="11pt"/>
    </style:style>
    <style:style style:name="P132" style:family="paragraph" style:parent-style-name="Standard">
      <style:paragraph-properties fo:margin-top="0.282cm" fo:margin-bottom="0.141cm" style:contextual-spacing="fals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133" style:family="paragraph" style:parent-style-name="Standard">
      <style:paragraph-properties fo:margin-top="0cm" fo:margin-bottom="0.141cm" style:contextual-spacing="false" fo:break-before="page"/>
      <style:text-properties fo:color="#1f7272" loext:opacity="100%" style:font-name="Arial" fo:font-size="12pt" fo:font-weight="bold" officeooo:paragraph-rsid="00d1b50e" style:font-name-asian="Arial3" style:font-size-asian="12pt" style:font-weight-asian="bold" style:font-name-complex="Arial3" style:font-size-complex="12pt" style:font-weight-complex="bold"/>
    </style:style>
    <style:style style:name="P134" style:family="paragraph" style:parent-style-name="Standard">
      <style:paragraph-properties fo:margin-top="0.141cm" fo:margin-bottom="0.141cm" style:contextual-spacing="false"/>
      <style:text-properties fo:color="#c00000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35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style:font-name-asian="Arial3" style:font-size-asian="11pt" style:font-name-complex="Arial3" style:font-size-complex="11pt"/>
    </style:style>
    <style:style style:name="P136" style:family="paragraph" style:parent-style-name="Standard">
      <loext:graphic-properties draw:fill="solid" draw:fill-color="#ffff00" draw:opacity="100%"/>
      <style:paragraph-properties fo:margin-top="0.106cm" fo:margin-bottom="0.106cm" style:contextual-spacing="false" fo:background-color="#ffff00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37" style:family="paragraph" style:parent-style-name="Standard">
      <loext:graphic-properties draw:fill="solid" draw:fill-color="#ffab40" draw:opacity="100%"/>
      <style:paragraph-properties fo:margin-top="0.106cm" fo:margin-bottom="0.106cm" style:contextual-spacing="false" fo:background-color="#ffab40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38" style:family="paragraph" style:parent-style-name="Standard">
      <loext:graphic-properties draw:fill="solid" draw:fill-color="#64ffda" draw:opacity="100%"/>
      <style:paragraph-properties fo:margin-top="0.106cm" fo:margin-bottom="0.106cm" style:contextual-spacing="false" fo:background-color="#64ffda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39" style:family="paragraph" style:parent-style-name="Standard">
      <loext:graphic-properties draw:fill="solid" draw:fill-color="#e040fb" draw:opacity="100%"/>
      <style:paragraph-properties fo:margin-top="0.106cm" fo:margin-bottom="0.106cm" style:contextual-spacing="false" fo:background-color="#e040fb"/>
      <style:text-properties fo:color="#404040" loext:opacity="100%" style:font-name="Arial" fo:font-size="11pt" officeooo:paragraph-rsid="00549b67" style:font-name-asian="Arial3" style:font-size-asian="11pt" style:font-name-complex="Arial3" style:font-size-complex="11pt"/>
    </style:style>
    <style:style style:name="P140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fo:background-color="#ffff00" style:font-name-asian="Arial3" style:font-size-asian="11pt" style:font-name-complex="Arial3" style:font-size-complex="11pt"/>
    </style:style>
    <style:style style:name="P141" style:family="paragraph" style:parent-style-name="Standard">
      <style:paragraph-properties fo:margin-top="0.106cm" fo:margin-bottom="0.106cm" style:contextual-spacing="false"/>
      <style:text-properties fo:color="#404040" loext:opacity="100%" style:font-name="Arial" fo:font-size="11pt" officeooo:paragraph-rsid="00d1b50e" fo:background-color="#18ffff" style:font-name-asian="Arial3" style:font-size-asian="11pt" style:font-name-complex="Arial3" style:font-size-complex="11pt"/>
    </style:style>
    <style:style style:name="P142" style:family="paragraph" style:parent-style-name="Standard">
      <style:paragraph-properties fo:margin-top="0.141cm" fo:margin-bottom="0.141cm" style:contextual-spacing="false"/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43" style:family="paragraph" style:parent-style-name="Standard">
      <style:text-properties fo:color="#375623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44" style:family="paragraph" style:parent-style-name="Standard">
      <style:paragraph-properties fo:margin-top="0.088cm" fo:margin-bottom="0.088cm" style:contextual-spacing="false"/>
      <style:text-properties fo:color="#375623" loext:opacity="100%" style:font-name="Arial" fo:font-size="11pt" officeooo:paragraph-rsid="00d1b50e" style:font-name-asian="Arial3" style:font-size-asian="11pt" style:font-name-complex="Arial3" style:font-size-complex="11pt"/>
    </style:style>
    <style:style style:name="P145" style:family="paragraph" style:parent-style-name="Standard">
      <style:paragraph-properties fo:margin-top="0.088cm" fo:margin-bottom="0.088cm" style:contextual-spacing="false"/>
      <style:text-properties fo:color="#5b2c6f" loext:opacity="100%" style:font-name="Arial" fo:font-size="11pt" officeooo:paragraph-rsid="00d1b50e" style:font-name-asian="Arial3" style:font-size-asian="11pt" style:font-name-complex="Arial3" style:font-size-complex="11pt"/>
    </style:style>
    <style:style style:name="P146" style:family="paragraph" style:parent-style-name="Standard">
      <style:paragraph-properties fo:margin-top="0.106cm" fo:margin-bottom="0.106cm" style:contextual-spacing="false"/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47" style:family="paragraph" style:parent-style-name="Standard">
      <style:text-properties fo:color="#5b2c6f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48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1b50e" style:font-name-asian="Courier New1" style:font-size-asian="10pt" style:font-name-complex="Courier New1" style:font-size-complex="10pt"/>
    </style:style>
    <style:style style:name="P149" style:family="paragraph" style:parent-style-name="Standard">
      <style:paragraph-properties fo:margin-top="0.064cm" fo:margin-bottom="0.064cm" style:contextual-spacing="false"/>
      <style:text-properties fo:color="#1f4e79" loext:opacity="100%" style:font-name="Courier New" fo:font-size="10pt" officeooo:paragraph-rsid="00dcd50c" style:font-name-asian="Courier New1" style:font-size-asian="10pt" style:font-name-complex="Courier New1" style:font-size-complex="10pt"/>
    </style:style>
    <style:style style:name="P150" style:family="paragraph" style:parent-style-name="Standard">
      <style:text-properties fo:color="#c55a11" loext:opacity="100%" style:font-name="Arial" fo:font-size="11pt" fo:font-weight="bold" officeooo:paragraph-rsid="00d1b50e" style:font-name-asian="Arial3" style:font-size-asian="11pt" style:font-weight-asian="bold" style:font-name-complex="Arial3" style:font-size-complex="11pt" style:font-weight-complex="bold"/>
    </style:style>
    <style:style style:name="P151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0d1b50e" style:font-name-asian="Arial3" style:font-size-asian="11pt" style:font-name-complex="Arial3" style:font-size-complex="11pt"/>
    </style:style>
    <style:style style:name="P152" style:family="paragraph" style:parent-style-name="Standard">
      <style:paragraph-properties fo:margin-top="0.088cm" fo:margin-bottom="0.088cm" style:contextual-spacing="false"/>
      <style:text-properties fo:color="#c55a11" loext:opacity="100%" style:font-name="Arial" fo:font-size="11pt" officeooo:paragraph-rsid="0109d510" style:font-name-asian="Arial3" style:font-size-asian="11pt" style:font-name-complex="Arial3" style:font-size-complex="11pt"/>
    </style:style>
    <style:style style:name="P153" style:family="paragraph" style:parent-style-name="Standard">
      <style:paragraph-properties fo:margin-top="0.106cm" fo:margin-bottom="0.106cm" style:contextual-spacing="false"/>
      <style:text-properties fo:color="#18ffff" loext:opacity="100%" style:font-name="Arial" fo:font-size="11pt" fo:font-weight="bold" officeooo:paragraph-rsid="00d1b50e" fo:background-color="#d500f9" style:font-name-asian="Arial3" style:font-size-asian="11pt" style:font-weight-asian="bold" style:font-name-complex="Arial3" style:font-size-complex="11pt" style:font-weight-complex="bold"/>
    </style:style>
    <style:style style:name="P154" style:family="paragraph" style:parent-style-name="Standard">
      <style:paragraph-properties fo:margin-top="0.106cm" fo:margin-bottom="0.106cm" style:contextual-spacing="false"/>
      <style:text-properties fo:color="#ffff00" loext:opacity="100%" style:font-name="Arial" fo:font-size="11pt" fo:font-weight="bold" officeooo:paragraph-rsid="00d1b50e" fo:background-color="#f50057" style:font-name-asian="Arial3" style:font-size-asian="11pt" style:font-weight-asian="bold" style:font-name-complex="Arial3" style:font-size-complex="11pt" style:font-weight-complex="bold"/>
    </style:style>
    <style:style style:name="P155" style:family="paragraph" style:parent-style-name="Standard">
      <style:paragraph-properties fo:margin-top="0.106cm" fo:margin-bottom="0.106cm" style:contextual-spacing="false"/>
      <style:text-properties fo:color="#eeff41" loext:opacity="100%" style:font-name="Arial" fo:font-size="11pt" fo:font-weight="bold" officeooo:paragraph-rsid="00d1b50e" fo:background-color="#ff1744" style:font-name-asian="Arial3" style:font-size-asian="11pt" style:font-weight-asian="bold" style:font-name-complex="Arial3" style:font-size-complex="11pt" style:font-weight-complex="bold"/>
    </style:style>
    <style:style style:name="P156" style:family="paragraph" style:parent-style-name="Standard">
      <style:paragraph-properties fo:margin-top="0.106cm" fo:margin-bottom="0.106cm" style:contextual-spacing="false"/>
      <style:text-properties fo:color="#eeff41" loext:opacity="100%" style:font-name="Arial" fo:font-size="11pt" fo:font-weight="bold" officeooo:paragraph-rsid="00d1b50e" fo:background-color="#000000" style:font-name-asian="Arial3" style:font-size-asian="11pt" style:font-weight-asian="bold" style:font-name-complex="Arial3" style:font-size-complex="11pt" style:font-weight-complex="bold"/>
    </style:style>
    <style:style style:name="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style style:name="T2" style:family="text">
      <style:text-properties fo:color="#595959" loext:opacity="100%" style:font-name="Arial" fo:font-size="11pt" style:font-name-asian="Arial3" style:font-size-asian="11pt" style:font-name-complex="Arial3" style:font-size-complex="11pt"/>
    </style:style>
    <style:style style:name="T3" style:family="text">
      <style:text-properties fo:background-color="#76ff03" loext:char-shading-value="0"/>
    </style:style>
    <style:style style:name="T4" style:family="text">
      <style:text-properties fo:background-color="#76ff03" loext:char-shading-value="0"/>
    </style:style>
    <style:style style:name="T5" style:family="text">
      <style:text-properties fo:background-color="#18ffff" loext:char-shading-value="0"/>
    </style:style>
    <style:style style:name="T6" style:family="text">
      <style:text-properties fo:background-color="#18ffff" loext:char-shading-value="0"/>
    </style:style>
    <style:style style:name="T7" style:family="text">
      <style:text-properties fo:color="#ffd740" loext:opacity="100%"/>
    </style:style>
    <style:style style:name="T8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9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0" style:family="text">
      <style:text-properties fo:color="#ffd740" loext:opacity="100%" fo:font-weight="bold" fo:background-color="#ff4081" loext:char-shading-value="0" style:font-weight-asian="bold" style:font-weight-complex="bold"/>
    </style:style>
    <style:style style:name="T11" style:family="text">
      <style:text-properties fo:color="#ffd740" loext:opacity="100%" fo:font-weight="bold" fo:background-color="#ffff00" loext:char-shading-value="0" style:font-weight-asian="bold" style:font-weight-complex="bold"/>
    </style:style>
    <style:style style:name="T12" style:family="text">
      <style:text-properties fo:color="#ffd740" loext:opacity="100%" fo:background-color="#000000" loext:char-shading-value="0"/>
    </style:style>
    <style:style style:name="T13" style:family="text">
      <style:text-properties fo:color="#ffd740" loext:opacity="100%" fo:background-color="#000000" loext:char-shading-value="0"/>
    </style:style>
    <style:style style:name="T14" style:family="text">
      <style:text-properties fo:color="#eeff41" loext:opacity="100%"/>
    </style:style>
    <style:style style:name="T15" style:family="text">
      <style:text-properties fo:color="#eeff41" loext:opacity="100%" fo:font-weight="bold" fo:background-color="#ff9100" loext:char-shading-value="0" style:font-weight-asian="bold" style:font-weight-complex="bold"/>
    </style:style>
    <style:style style:name="T16" style:family="text">
      <style:text-properties fo:color="#eeff41" loext:opacity="100%" fo:font-weight="bold" fo:background-color="#ff1744" loext:char-shading-value="0" style:font-weight-asian="bold" style:font-weight-complex="bold"/>
    </style:style>
    <style:style style:name="T17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8" style:family="text">
      <style:text-properties fo:color="#eeff41" loext:opacity="100%" fo:font-weight="bold" fo:background-color="#f50057" loext:char-shading-value="0" style:font-weight-asian="bold" style:font-weight-complex="bold"/>
    </style:style>
    <style:style style:name="T19" style:family="text">
      <style:text-properties fo:color="#eeff41" loext:opacity="100%" fo:font-weight="bold" fo:background-color="#000000" loext:char-shading-value="0" style:font-weight-asian="bold" style:font-weight-complex="bold"/>
    </style:style>
    <style:style style:name="T20" style:family="text">
      <style:text-properties fo:color="#eeff41" loext:opacity="100%" fo:font-weight="bold" fo:background-color="#3d5afe" loext:char-shading-value="0" style:font-weight-asian="bold" style:font-weight-complex="bold"/>
    </style:style>
    <style:style style:name="T21" style:family="text">
      <style:text-properties fo:color="#eeff41" loext:opacity="100%" fo:background-color="#f50057" loext:char-shading-value="0"/>
    </style:style>
    <style:style style:name="T22" style:family="text">
      <style:text-properties fo:color="#eeff41" loext:opacity="100%" fo:background-color="#f50057" loext:char-shading-value="0"/>
    </style:style>
    <style:style style:name="T23" style:family="text">
      <style:text-properties fo:color="#eeff41" loext:opacity="100%" style:font-name="Arial2" fo:font-weight="bold" fo:background-color="#f50057" loext:char-shading-value="0" style:font-name-asian="Arial2" style:font-weight-asian="bold" style:font-weight-complex="bold"/>
    </style:style>
    <style:style style:name="T24" style:family="text">
      <style:text-properties fo:color="#eeff41" loext:opacity="100%" style:font-name="Arial2" fo:font-weight="normal" fo:background-color="#f50057" loext:char-shading-value="0" style:font-name-asian="Arial2" style:font-weight-asian="normal" style:font-weight-complex="normal"/>
    </style:style>
    <style:style style:name="T25" style:family="text">
      <style:text-properties fo:color="#18ffff" loext:opacity="100%"/>
    </style:style>
    <style:style style:name="T26" style:family="text">
      <style:text-properties fo:color="#18ffff" loext:opacity="100%" fo:font-weight="bold" fo:background-color="#f50057" loext:char-shading-value="0" style:font-weight-asian="bold" style:font-weight-complex="bold"/>
    </style:style>
    <style:style style:name="T2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18ffff" loext:opacity="100%" fo:font-weight="bold" fo:background-color="#5d4037" loext:char-shading-value="0" style:font-weight-asian="bold" style:font-weight-complex="bold"/>
    </style:style>
    <style:style style:name="T30" style:family="text">
      <style:text-properties fo:color="#18ffff" loext:opacity="100%" fo:font-weight="bold" fo:background-color="#651fff" loext:char-shading-value="0" style:font-weight-asian="bold" style:font-weight-complex="bold"/>
    </style:style>
    <style:style style:name="T31" style:family="text">
      <style:text-properties fo:color="#18ffff" loext:opacity="100%" fo:font-weight="bold" fo:background-color="#e040fb" loext:char-shading-value="0" style:font-weight-asian="bold" style:font-weight-complex="bold"/>
    </style:style>
    <style:style style:name="T32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33" style:family="text">
      <style:text-properties fo:color="#18ffff" loext:opacity="100%" fo:background-color="#d500f9" loext:char-shading-value="0"/>
    </style:style>
    <style:style style:name="T34" style:family="text">
      <style:text-properties fo:color="#18ffff" loext:opacity="100%" fo:background-color="#d500f9" loext:char-shading-value="0"/>
    </style:style>
    <style:style style:name="T35" style:family="text">
      <style:text-properties fo:color="#18ffff" loext:opacity="100%" fo:background-color="#000000" loext:char-shading-value="0"/>
    </style:style>
    <style:style style:name="T36" style:family="text">
      <style:text-properties fo:color="#18ffff" loext:opacity="100%" fo:background-color="#000000" loext:char-shading-value="0"/>
    </style:style>
    <style:style style:name="T37" style:family="text">
      <style:text-properties fo:color="#76ff03" loext:opacity="100%"/>
    </style:style>
    <style:style style:name="T38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39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40" style:family="text">
      <style:text-properties fo:color="#76ff03" loext:opacity="100%" fo:font-weight="bold" fo:background-color="#3d5afe" loext:char-shading-value="0" style:font-weight-asian="bold" style:font-weight-complex="bold"/>
    </style:style>
    <style:style style:name="T41" style:family="text">
      <style:text-properties fo:color="#76ff03" loext:opacity="100%" fo:font-weight="bold" fo:background-color="#ff5252" loext:char-shading-value="0" style:font-weight-asian="bold" style:font-weight-complex="bold"/>
    </style:style>
    <style:style style:name="T42" style:family="text">
      <style:text-properties fo:color="#76ff03" loext:opacity="100%" fo:background-color="#5d4037" loext:char-shading-value="0"/>
    </style:style>
    <style:style style:name="T43" style:family="text">
      <style:text-properties fo:color="#76ff03" loext:opacity="100%" fo:background-color="#5d4037" loext:char-shading-value="0"/>
    </style:style>
    <style:style style:name="T44" style:family="text">
      <style:text-properties fo:color="#1f4e79" loext:opacity="100%" style:font-name="Courier New" fo:font-size="10pt" style:font-name-asian="Courier New1" style:font-size-asian="10pt" style:font-name-complex="Courier New1" style:font-size-complex="10pt"/>
    </style:style>
    <style:style style:name="T45" style:family="text">
      <style:text-properties fo:color="#ffff00" loext:opacity="100%" fo:font-weight="bold" fo:background-color="#000000" loext:char-shading-value="0" style:font-weight-asian="bold" style:font-weight-complex="bold"/>
    </style:style>
    <style:style style:name="T46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47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48" style:family="text">
      <style:text-properties fo:background-color="#ffff00" loext:char-shading-value="0"/>
    </style:style>
    <style:style style:name="T49" style:family="text">
      <style:text-properties fo:background-color="#ffff00" loext:char-shading-value="0"/>
    </style:style>
    <style:style style:name="T50" style:family="text">
      <style:text-properties fo:background-color="#ffd740" loext:char-shading-value="0"/>
    </style:style>
    <style:style style:name="T51" style:family="text">
      <style:text-properties fo:background-color="#ffd740" loext:char-shading-value="0"/>
    </style:style>
    <style:style style:name="T52" style:family="text">
      <style:text-properties fo:color="#3d5afe" loext:opacity="100%" fo:font-weight="bold" fo:background-color="#ffd740" loext:char-shading-value="0" style:font-weight-asian="bold" style:font-weight-complex="bold"/>
    </style:style>
    <style:style style:name="T53" style:family="text">
      <style:text-properties fo:background-color="#d500f9" loext:char-shading-value="0"/>
    </style:style>
    <style:style style:name="T54" style:family="text">
      <style:text-properties fo:font-weight="bold" fo:background-color="#eeff41" loext:char-shading-value="0" style:font-weight-asian="bold" style:font-weight-complex="bold"/>
    </style:style>
    <style:style style:name="T55" style:family="text">
      <style:text-properties fo:font-weight="bold" fo:background-color="#ffff00" loext:char-shading-value="0" style:font-weight-asian="bold" style:font-weight-complex="bold"/>
    </style:style>
    <style:style style:name="T56" style:family="text">
      <style:text-properties fo:font-weight="bold" fo:background-color="#ffff00" loext:char-shading-value="0" style:font-weight-asian="bold" style:font-weight-complex="bold"/>
    </style:style>
    <style:style style:name="T57" style:family="text">
      <style:text-properties fo:font-weight="bold" fo:background-color="#ffd740" loext:char-shading-value="0" style:font-weight-asian="bold" style:font-weight-complex="bold"/>
    </style:style>
    <style:style style:name="T58" style:family="text">
      <style:text-properties fo:font-weight="bold" fo:background-color="#ffd740" loext:char-shading-value="0" style:font-weight-asian="bold" style:font-weight-complex="bold"/>
    </style:style>
    <style:style style:name="T59" style:family="text">
      <style:text-properties fo:font-weight="bold" fo:background-color="#18ffff" loext:char-shading-value="0" style:font-weight-asian="bold" style:font-weight-complex="bold"/>
    </style:style>
    <style:style style:name="T60" style:family="text">
      <style:text-properties fo:font-weight="bold" fo:background-color="#18ffff" loext:char-shading-value="0" style:font-weight-asian="bold" style:font-weight-complex="bold"/>
    </style:style>
    <style:style style:name="T61" style:family="text">
      <style:text-properties fo:font-weight="bold" fo:background-color="#00e676" loext:char-shading-value="0" style:font-weight-asian="bold" style:font-weight-complex="bold"/>
    </style:style>
    <style:style style:name="T62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63" style:family="text">
      <style:text-properties fo:color="#ff6e40" loext:opacity="100%" fo:font-weight="bold" fo:background-color="#000000" loext:char-shading-value="0" style:font-weight-asian="bold" style:font-weight-complex="bold"/>
    </style:style>
    <style:style style:name="T64" style:family="text">
      <style:text-properties fo:color="#ffc400" loext:opacity="100%" fo:font-weight="bold" fo:background-color="#000000" loext:char-shading-value="0" style:font-weight-asian="bold" style:font-weight-complex="bold"/>
    </style:style>
    <style:style style:name="T65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66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67" style:family="text">
      <style:text-properties fo:color="#f3e5f5" loext:opacity="100%" fo:font-weight="bold" fo:background-color="#e040fb" loext:char-shading-value="0" style:font-weight-asian="bold" style:font-weight-complex="bold"/>
    </style:style>
    <style:style style:name="T68" style:family="text">
      <style:text-properties fo:color="#ff9100" loext:opacity="100%" fo:font-weight="bold" fo:background-color="#64ffda" loext:char-shading-value="0" style:font-weight-asian="bold" style:font-weight-complex="bold"/>
    </style:style>
    <style:style style:name="T69" style:family="text">
      <style:text-properties fo:background-color="#eeff41" loext:char-shading-value="0"/>
    </style:style>
    <style:style style:name="T70" style:family="text">
      <style:text-properties fo:background-color="#eeff41" loext:char-shading-value="0"/>
    </style:style>
    <style:style style:name="T71" style:family="text">
      <style:text-properties fo:background-color="#ffc400" loext:char-shading-value="0"/>
    </style:style>
    <style:style style:name="T72" style:family="text">
      <style:text-properties fo:background-color="#64ffda" loext:char-shading-value="0"/>
    </style:style>
    <style:style style:name="T73" style:family="text">
      <style:text-properties fo:background-color="#64ffda" loext:char-shading-value="0"/>
    </style:style>
    <style:style style:name="T74" style:family="text">
      <style:text-properties fo:background-color="#ff4081" loext:char-shading-value="0"/>
    </style:style>
    <style:style style:name="T75" style:family="text">
      <style:text-properties fo:color="#375623" loext:opacity="100%" style:font-name="Arial" fo:font-size="11pt" style:font-name-asian="Arial3" style:font-size-asian="11pt" style:font-name-complex="Arial3" style:font-size-complex="11pt"/>
    </style:style>
    <style:style style:name="T76" style:family="text">
      <style:text-properties fo:color="#2e75b6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77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78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79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80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81" style:family="text">
      <style:text-properties fo:color="#ff3d00" loext:opacity="100%" fo:background-color="#64ffda" loext:char-shading-value="0"/>
    </style:style>
    <style:style style:name="T82" style:family="text">
      <style:text-properties fo:color="#64ffda" loext:opacity="100%"/>
    </style:style>
    <style:style style:name="T83" style:family="text">
      <style:text-properties fo:color="#64ffda" loext:opacity="100%" fo:font-weight="bold" fo:background-color="#000000" loext:char-shading-value="0" style:font-weight-asian="bold" style:font-weight-complex="bold"/>
    </style:style>
    <style:style style:name="T84" style:family="text">
      <style:text-properties fo:color="#64ffda" loext:opacity="100%" fo:font-weight="bold" fo:background-color="#5d4037" loext:char-shading-value="0" style:font-weight-asian="bold" style:font-weight-complex="bold"/>
    </style:style>
    <style:style style:name="T85" style:family="text">
      <style:text-properties fo:color="#64ffda" loext:opacity="100%" fo:background-color="#5d4037" loext:char-shading-value="0"/>
    </style:style>
    <style:style style:name="T86" style:family="text">
      <style:text-properties fo:color="#64ffda" loext:opacity="100%" fo:background-color="#5d4037" loext:char-shading-value="0"/>
    </style:style>
    <style:style style:name="T87" style:family="text">
      <style:text-properties fo:color="#fce4ec" loext:opacity="100%" fo:font-weight="bold" fo:background-color="#ff5252" loext:char-shading-value="0" style:font-weight-asian="bold" style:font-weight-complex="bold"/>
    </style:style>
    <style:style style:name="T88" style:family="text">
      <style:text-properties fo:color="#ff5252" loext:opacity="100%" fo:font-weight="bold" fo:background-color="#000000" loext:char-shading-value="0" style:font-weight-asian="bold" style:font-weight-complex="bold"/>
    </style:style>
    <style:style style:name="T89" style:family="text">
      <style:text-properties fo:background-color="#ff5252" loext:char-shading-value="0"/>
    </style:style>
    <style:style style:name="T90" style:family="text">
      <style:text-properties officeooo:rsid="00dcd50c" fo:background-color="#ff5252" loext:char-shading-value="0"/>
    </style:style>
    <style:style style:name="T91" style:family="text">
      <style:text-properties fo:background-color="#f50057" loext:char-shading-value="0"/>
    </style:style>
    <style:style style:name="T92" style:family="text">
      <style:text-properties fo:background-color="#f50057" loext:char-shading-value="0"/>
    </style:style>
    <style:style style:name="T93" style:family="text">
      <style:text-properties fo:color="#f50057" loext:opacity="100%" fo:background-color="#ffff00" loext:char-shading-value="0"/>
    </style:style>
    <style:style style:name="T94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95" style:family="text">
      <style:text-properties fo:background-color="#1de9b6" loext:char-shading-value="0"/>
    </style:style>
    <style:style style:name="T96" style:family="text">
      <style:text-properties fo:background-color="transparent" loext:char-shading-value="0"/>
    </style:style>
    <style:style style:name="T97" style:family="text">
      <style:text-properties fo:background-color="#00e676" loext:char-shading-value="0"/>
    </style:style>
    <style:style style:name="T98" style:family="text">
      <style:text-properties fo:background-color="#00e676" loext:char-shading-value="0"/>
    </style:style>
    <style:style style:name="T99" style:family="text">
      <style:text-properties fo:color="#ff4081" loext:opacity="100%"/>
    </style:style>
    <style:style style:name="T100" style:family="text">
      <style:text-properties fo:color="#ff4081" loext:opacity="100%" fo:background-color="#000000" loext:char-shading-value="0"/>
    </style:style>
    <style:style style:name="T101" style:family="text">
      <style:text-properties fo:color="#ff4081" loext:opacity="100%" fo:background-color="#000000" loext:char-shading-value="0"/>
    </style:style>
    <style:style style:name="T102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103" style:family="text">
      <style:text-properties fo:color="#b2ff59" loext:opacity="100%" fo:font-weight="bold" fo:background-color="#5d4037" loext:char-shading-value="0" style:font-weight-asian="bold" style:font-weight-complex="bold"/>
    </style:style>
    <style:style style:name="T104" style:family="text">
      <style:text-properties fo:color="#b2ff59" loext:opacity="100%" fo:font-weight="bold" fo:background-color="#6d4c41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2">二元樹（Binary Tree）</text:p>
      <text:p text:style-name="P2">完整學習筆記 — 超白話版</text:p>
      <text:p text:style-name="P33">含考場公式、考題解析、錯誤糾正、動畫級說明</text:p>
      <text:p text:style-name="P11"/>
      <text:p text:style-name="P1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3">📌 本筆記適用範圍</text:p>
            <text:p text:style-name="P13"><text:s text:c="3"/>✔ 公職考試（高考 / 普考 / 各類特考）</text:p>
            <text:p text:style-name="P13"><text:s text:c="3"/>✔ 大學資料結構期末考</text:p>
            <text:p text:style-name="P13"><text:s text:c="3"/>✔ 從零開始學二元樹的讀者</text:p>
            <text:p text:style-name="P38"/>
            <text:p text:style-name="P13">📌 本筆記涵蓋</text:p>
            <text:p text:style-name="P13"><text:s text:c="3"/>✔ 圖片原始考試筆記逐行拆解與錯誤修正</text:p>
            <text:p text:style-name="P13"><text:s text:c="3"/>✔ 113 Q1、114 Q1、115 Q2、113 Q4 歷屆考題詳解</text:p>
            <text:p text:style-name="P13"><text:s text:c="3"/>✔ 所有公式推導（不跳步）</text:p>
            <text:p text:style-name="P13"><text:s text:c="3"/>✔ DFS（前序、中序、後序） ＋ BFS 完整說明</text:p>
            <text:p text:style-name="P13"><text:s text:c="3"/>✔ Heap、Priority Queue、陣列表示法</text:p>
            <text:p text:style-name="P13"><text:s text:c="3"/>✔ 唯一重建樹的完整步驟</text:p>
          </table:table-cell>
        </table:table-row>
      </table:table>
      <text:p text:style-name="P11"/>
      <text:p text:style-name="P11"/>
      <text:p text:style-name="Standard"/>
      <text:h text:style-name="P24" text:outline-level="1">第一章：從零開始 — 什麼是「樹」？</text:h>
      <text:p text:style-name="P34">在學任何公式之前，先把樹的形狀刻進腦子裡。</text:p>
      <text:h text:style-name="P3" text:outline-level="2">1.1 現實生活比喻</text:h>
      <text:p text:style-name="P34">把 Binary Tree 想成一本「家譜」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6"><text:s text:c="9"/>爸爸 (root)</text:p>
            <text:p text:style-name="P26"><text:s text:c="8"/>/ <text:s text:c="4"/>\</text:p>
            <text:p text:style-name="P26"><text:s text:c="6"/>哥哥 <text:s text:c="4"/>姐姐</text:p>
            <text:p text:style-name="P26"><text:s text:c="6"/>/ <text:s/>\</text:p>
            <text:p text:style-name="P26"><text:s text:c="3"/>小明 <text:s/>小華</text:p>
          </table:table-cell>
        </table:table-row>
      </table:table>
      <text:p text:style-name="P34">這就是一棵樹。電腦科學裡的樹是倒過來的：根在最上面，葉子在最下面。</text:p>
      <text:p text:style-name="P11"/>
      <text:h text:style-name="P3" text:outline-level="2">1.2 樹的核心名詞（逐一說清楚）</text:h>
      <table:table table:name="表格3" table:style-name="表格3">
        <table:table-column table:style-name="表格3.A" table:number-columns-repeated="2"/>
        <table:table-row table:style-name="表格3.1">
          <table:table-cell table:style-name="表格3.A1" office:value-type="string">
            <text:p text:style-name="P17">名詞（英文）</text:p>
            <text:p text:style-name="P17">root（根節點）</text:p>
            <text:p text:style-name="P17">child（子節點）</text:p>
            <text:p text:style-name="P17">parent（父節點）</text:p>
            <text:p text:style-name="P17">leaf（葉節點）</text:p>
            <text:p text:style-name="P23">degree（度數）</text:p>
            <text:p text:style-name="P17">edge / branch（邊）</text:p>
            <text:p text:style-name="P17">internal node（內部節點）</text:p>
            <text:p text:style-name="P17">subtree（子樹）</text:p>
            <text:p text:style-name="P17">forest（森林）</text:p>
          </table:table-cell>
          <table:table-cell table:style-name="表格3.B1" office:value-type="string">
            <text:p text:style-name="P17">說明</text:p>
            <text:p text:style-name="P35">最頂端的節點，只有一個</text:p>
            <text:p text:style-name="P35">往下連接的節點</text:p>
            <text:p text:style-name="P35">往上連接的節點</text:p>
            <text:p text:style-name="P35">degree = 0，沒有 child 的節點</text:p>
            <text:p text:style-name="P35"><text:span text:style-name="T3">一個節點有幾個 child</text:span>（<text:span text:style-name="T5">二元樹最多 = 2</text:span>）</text:p>
            <text:p text:style-name="P35">連接兩個節點的線；n 個節點 ⇒ n−1 條邊</text:p>
            <text:p text:style-name="P35">degree ≥ 1，還有子節點</text:p>
            <text:p text:style-name="P35">以任意節點為 root 往下看，本身也是一棵樹</text:p>
            <text:p text:style-name="P35">多棵樹放在一起就是森林</text:p>
          </table:table-cell>
        </table:table-row>
      </table:table>
      <text:p text:style-name="P11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39">⚠️ 重要：樹沒有環（Cycle）！</text:p>
            <text:p text:style-name="P39">若節點 A → B → C → A（繞回去），那就不叫樹，叫圖（Graph）。</text:p>
            <text:p text:style-name="P39">Tree 的定義：n 個節點、n−1 條邊、無環、連通。</text:p>
          </table:table-cell>
        </table:table-row>
      </table:table>
      <text:p text:style-name="Standard"/>
      <text:h text:style-name="P24" text:outline-level="1">第二章：Binary Tree（二元樹）</text:h>
      <text:h text:style-name="P3" text:outline-level="2">2.1 定義</text:h>
      <text:p text:style-name="P34"><text:span text:style-name="T8">每個節點最多只能有「兩個」子節點</text:span>：<text:span text:style-name="T15">左子節點（left child）</text:span>和<text:span text:style-name="T26">右子節點（right child）</text:span>。</text:p>
      <table:table table:name="表格7" table:style-name="表格7">
        <table:table-column table:style-name="表格7.A" table:number-columns-repeated="2"/>
        <table:table-row table:style-name="表格7.1">
          <table:table-cell table:style-name="表格7.A1" office:value-type="string">
            <text:p text:style-name="P46">✅ 合法 Binary Tree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26"><text:s text:c="4"/>A</text:p>
                  <text:p text:style-name="P26"><text:s text:c="3"/>/ \</text:p>
                  <text:p text:style-name="P26"><text:s text:c="2"/>B <text:s text:c="2"/>C</text:p>
                  <text:p text:style-name="P26"><text:s text:c="3"/>\</text:p>
                  <text:p text:style-name="P26"><text:s text:c="4"/>D</text:p>
                </table:table-cell>
              </table:table-row>
            </table:table>
            <text:p text:style-name="Standard"/>
          </table:table-cell>
          <table:table-cell table:style-name="表格7.B1" office:value-type="string">
            <text:p text:style-name="P57">❌ 不合法（三個子節點）</text:p>
            <table:table table:name="表格6" table:style-name="表格6">
              <table:table-column table:style-name="表格6.A"/>
              <table:table-row table:style-name="表格6.1">
                <table:table-cell table:style-name="表格6.A1" office:value-type="string">
                  <text:p text:style-name="P26"><text:s text:c="4"/>A</text:p>
                  <text:p text:style-name="P26"><text:s/>/ | \</text:p>
                  <text:p text:style-name="P26"><text:s/>B <text:s/>C <text:s/>D</text:p>
                </table:table-cell>
              </table:table-row>
            </table:table>
            <text:p text:style-name="Standard"/>
          </table:table-cell>
        </table:table-row>
      </table:table>
      <text:p text:style-name="P11"/>
      <text:h text:style-name="P3" text:outline-level="2">2.2 重要公式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3">公式1：分支數（branch）= n − 1</text:p>
            <text:p text:style-name="P13"><text:s text:c="2"/>→<text:span text:style-name="T38"> n 個節點</text:span>的二元樹，共有 <text:span text:style-name="T26">n−1 條邊</text:span></text:p>
            <text:p text:style-name="P38"/>
            <text:p text:style-name="P13">公式2：葉節點（n0） = 度數為2的節點（n2） + 1</text:p>
            <text:p text:style-name="P13"><text:s text:c="2"/>→ n0 = n2 + 1 <text:s text:c="2"/>← 圖片原始考試筆記中隱含的超重要公式！</text:p>
            <text:p text:style-name="P38"/>
            <text:p text:style-name="P13">公式3：Full Binary Tree（滿二元樹）最大節點數 = 2^h − 1</text:p>
            <text:p text:style-name="P13"><text:s text:c="2"/>→ 高度 h 時，每層全滿</text:p>
            <text:p text:style-name="P38"/>
            <text:p text:style-name="P13">公式4：2^(h−1) ≤ n ≤ 2^h − 1</text:p>
            <text:p text:style-name="P13"><text:s text:c="2"/>→ 高度 h 的二元樹，節點數範圍</text:p>
          </table:table-cell>
        </table:table-row>
      </table:table>
      <text:p text:style-name="P11"/>
      <text:h text:style-name="P3" text:outline-level="2">2.3 公式2 的推導（n0 = n2 + 1）</text:h>
      <text:p text:style-name="P64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14">這個公式的意思是：</text:p>
            <text:p text:style-name="P14">「葉節點的數量」永遠等於「有兩個小孩的節點數量」加 1。</text:p>
            <text:p text:style-name="P65"/>
            <text:p text:style-name="P14">公式本身只有一行： <text:s/>n₀ = n₂ + 1</text:p>
            <text:p text:style-name="P14">但直接背沒有用——考試會換各種方向問，所以要真正懂推導過程。</text:p>
          </table:table-cell>
        </table:table-row>
      </table:table>
      <text:p text:style-name="P64"/>
      <text:p text:style-name="P67">第一步：先把 degree（度數）看懂</text:p>
      <text:p text:style-name="P77"><text:span text:style-name="T27">degree = 一個節點有幾個小孩（child）</text:span>。二元樹最多 2 個。</text:p>
      <text:p text:style-name="P77">用這棵樹來感受：</text:p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27"><text:s text:c="8"/>A <text:s text:c="7"/>← degree(A) = 2 <text:s text:c="2"/>（有 B、C 兩個小孩）</text:p>
            <text:p text:style-name="P27"><text:s text:c="7"/>/ \</text:p>
            <text:p text:style-name="P66"><text:soft-page-break/><text:span text:style-name="T44"><text:s text:c="6"/>B <text:s text:c="2"/>C <text:s text:c="5"/>← degree(C) = 0 <text:s text:c="2"/>（沒小孩，是葉子）</text:span></text:p>
            <text:p text:style-name="P27"><text:s text:c="5"/>/</text:p>
            <text:p text:style-name="P27"><text:s text:c="4"/>D <text:s text:c="11"/>← degree(B) = 1 <text:s text:c="2"/>（只有 D 一個小孩）</text:p>
            <text:p text:style-name="P27"><text:s text:c="17"/>← degree(D) = 0 <text:s text:c="2"/>（沒小孩，是葉子）</text:p>
          </table:table-cell>
        </table:table-row>
      </table:table>
      <text:p text:style-name="P64"/>
      <table:table table:name="表格57" table:style-name="表格57">
        <table:table-column table:style-name="表格57.A"/>
        <table:table-column table:style-name="表格57.B"/>
        <table:table-row table:style-name="表格57.1">
          <table:table-cell table:style-name="表格57.A1" office:value-type="string">
            <text:p text:style-name="P88">定義</text:p>
          </table:table-cell>
          <table:table-cell table:style-name="表格57.B1" office:value-type="string">
            <text:p text:style-name="P78"><text:span text:style-name="T45">n₀ <text:s/>= degree 為 0 的節點數</text:span> <text:s/>→ 葉節點（Leaf）</text:p>
            <text:p text:style-name="P78"><text:span text:style-name="T38">n₁ <text:s/>= degree 為 1 的節點數</text:span> <text:s/>→ 只有一個小孩的節點</text:p>
            <text:p text:style-name="P78"><text:span text:style-name="T26">n₂ <text:s/>= degree 為 2 的節點數</text:span> <text:s/>→ 有兩個小孩的節點</text:p>
          </table:table-cell>
        </table:table-row>
      </table:table>
      <text:p text:style-name="P64"/>
      <text:p text:style-name="P77">以上方那棵樹為例：</text:p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27"><text:s text:c="2"/>n₀ = 2 <text:s/>（<text:span text:style-name="T48">C 和 D 是葉子</text:span>）</text:p>
            <text:p text:style-name="P27"><text:s text:c="2"/>n₁ = 1 <text:s/>（<text:span text:style-name="T48">B 只有一個小孩</text:span>）</text:p>
            <text:p text:style-name="P27"><text:s text:c="2"/>n₂ = 1 <text:s/>（<text:span text:style-name="T48">A 有兩個小孩</text:span>）</text:p>
            <text:p text:style-name="P27"><text:s text:c="2"/>驗證：n₀ = n₂ + 1 <text:s/>→ <text:s/>2 = 1 + 1 <text:s/>✔</text:p>
          </table:table-cell>
        </table:table-row>
      </table:table>
      <text:p text:style-name="P64"/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88">步驟 1</text:p>
          </table:table-cell>
          <table:table-cell table:style-name="表格59.B1" office:value-type="string">
            <text:p text:style-name="P78"><text:span text:style-name="T27">總節點數 = 三種度數節點加起來</text:span>：</text:p>
            <text:p text:style-name="P78">n <text:s/>= <text:s/>n₀ + n₁ + n₂</text:p>
          </table:table-cell>
        </table:table-row>
      </table:table>
      <text:p text:style-name="P64"/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office:value-type="string">
            <text:p text:style-name="P88">步驟 2</text:p>
          </table:table-cell>
          <table:table-cell table:style-name="表格60.B1" office:value-type="string">
            <text:p text:style-name="P78">從「節點個數」看邊數：</text:p>
            <text:p text:style-name="P65"/>
            <text:p text:style-name="P78">樹有一個性質：<text:span text:style-name="T16">n 個節點，一定有 n−1 條邊</text:span>。</text:p>
            <text:p text:style-name="P78">（因為<text:span text:style-name="T38">每條邊都連著一個被連過來的節點</text:span>，<text:span text:style-name="T29">除了 root 每個人都有一條邊連著自己</text:span>）</text:p>
            <text:p text:style-name="P65"/>
            <text:p text:style-name="P80"><text:s text:c="2"/>▶ <text:span text:style-name="T50">邊數 <text:s/>= <text:s/>n(</text:span><text:span text:style-name="T52">n 個節點</text:span><text:span text:style-name="T50">) − 1 </text:span><text:s text:c="8"/>← 第一個邊數公式</text:p>
          </table:table-cell>
        </table:table-row>
      </table:table>
      <text:p text:style-name="P64"/>
      <text:p text:style-name="P77">直覺驗證：</text:p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27"><text:s text:c="2"/>1 個節點 <text:s/>→ <text:s/>0 條邊 <text:s text:c="3"/>(1 - 1 = 0) ✔</text:p>
            <text:p text:style-name="P27"><text:s text:c="2"/>2 個節點 <text:s/>→ <text:s/>1 條邊 <text:s text:c="3"/>(2 - 1 = 1) ✔</text:p>
            <text:p text:style-name="P27"><text:s text:c="2"/>4 個節點 <text:s/>→ <text:s/>3 條邊 <text:s text:c="3"/>(4 - 1 = 3) ✔</text:p>
          </table:table-cell>
        </table:table-row>
      </table:table>
      <text:p text:style-name="P64"/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office:value-type="string">
            <text:p text:style-name="P88">步驟 3</text:p>
          </table:table-cell>
          <table:table-cell table:style-name="表格62.B1" office:value-type="string">
            <text:p text:style-name="P78">從「<text:span text:style-name="T8">每個節點往下伸出幾條線</text:span>」<text:span text:style-name="T17">看邊數</text:span>：</text:p>
            <text:p text:style-name="P65"/>
            <text:p text:style-name="P78">換個角度——<text:span text:style-name="T46">每個節點都可以向下「貢獻」它的子邊</text:span>：</text:p>
            <text:p text:style-name="P78"><text:s text:c="2"/>• degree = 0 的節點（葉子） <text:s text:c="2"/>→ 貢獻 <text:s/>0 <text:s/>條邊</text:p>
            <text:p text:style-name="P78"><text:s text:c="2"/>• degree = 1 的節點 <text:s text:c="10"/>→ 貢獻 <text:s/>1 <text:s/>條邊</text:p>
            <text:p text:style-name="P78"><text:s text:c="2"/>• degree = 2 的節點 <text:s text:c="10"/>→ 貢獻 <text:s/>2 <text:s/>條邊</text:p>
            <text:p text:style-name="P65"/>
            <text:p text:style-name="P78"><text:span text:style-name="T27">把全部節點的貢獻加起來，就是樹的總邊數</text:span>：</text:p>
            <text:p text:style-name="P65"><text:soft-page-break/></text:p>
            <text:p text:style-name="P78"><text:s text:c="2"/>▶ <text:span text:style-name="T16">邊數</text:span> <text:s/>= <text:s/><text:span text:style-name="T16">0</text:span>×n₀ <text:s/>+ <text:s/><text:span text:style-name="T16">1</text:span>×n₁ <text:s/>+ <text:s/><text:span text:style-name="T16">2</text:span>×n₂ <text:s text:c="2"/>← 第二個邊數公式</text:p>
          </table:table-cell>
        </table:table-row>
      </table:table>
      <text:p text:style-name="P64"/>
      <text:p text:style-name="P77">視覺化說明（最容易出現「蛤？？」的地方）：</text:p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27"><text:s text:c="2"/>A 有兩個小孩 B、C <text:s/>→ <text:s/>A 往下伸出 2 條線</text:p>
            <text:p text:style-name="P27"><text:s text:c="2"/>┌─── A ───┐</text:p>
            <text:p text:style-name="P27"><text:s text:c="2"/>│ <text:s text:c="8"/>│</text:p>
            <text:p text:style-name="P27"><text:s text:c="2"/>B <text:s text:c="8"/>C <text:s text:c="3"/>← A 貢獻了 2 條邊（A→B、A→C）</text:p>
            <text:p text:style-name="P66"/>
            <text:p text:style-name="P27"><text:s text:c="2"/>B 有一個小孩 D <text:s/>→ <text:s/>B 往下伸出 1 條線</text:p>
            <text:p text:style-name="P27"><text:s text:c="2"/>B</text:p>
            <text:p text:style-name="P27"><text:s text:c="2"/>│</text:p>
            <text:p text:style-name="P27"><text:s text:c="2"/>D <text:s text:c="13"/>← B 貢獻了 1 條邊（B→D）</text:p>
            <text:p text:style-name="P66"/>
            <text:p text:style-name="P27"><text:s text:c="2"/>C、D 沒有小孩 <text:s/>→ <text:s/>各貢獻 0 條邊</text:p>
            <text:p text:style-name="P66"/>
            <text:p text:style-name="P27"><text:s text:c="2"/>全部加起來：2 + 1 + 0 + 0 = 3 條邊 <text:s/>= <text:s/>n−1 = 4−1 = 3 <text:s/>✔</text:p>
          </table:table-cell>
        </table:table-row>
      </table:table>
      <text:p text:style-name="P64"/>
      <table:table table:name="表格64" table:style-name="表格64"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88">步驟 4</text:p>
          </table:table-cell>
          <table:table-cell table:style-name="表格64.B1" office:value-type="string">
            <text:p text:style-name="P78">兩個邊數公式算的是同一件事，所以畫等號：</text:p>
            <text:p text:style-name="P89"/>
            <text:p text:style-name="P78"><text:s/><text:span text:style-name="T53"><text:s/></text:span><text:span text:style-name="T27">n − 1 <text:s/>= <text:s/>0×n₀ <text:s/>+ <text:s/>1×n₁ <text:s/>+ <text:s/>2×n₂</text:span></text:p>
            <text:p text:style-name="P65"/>
            <text:p text:style-name="P78">把 n = n₀ + n₁ + n₂ 代入左邊：</text:p>
            <text:p text:style-name="P65"/>
            <text:p text:style-name="P78"><text:s text:c="2"/>n₀ + n₁ + n₂ − 1 <text:s/>= <text:s/>n₁ + 2n₂</text:p>
          </table:table-cell>
        </table:table-row>
      </table:table>
      <text:p text:style-name="P64"/>
      <table:table table:name="表格65" table:style-name="表格65"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88">步驟 5</text:p>
          </table:table-cell>
          <table:table-cell table:style-name="表格65.B1" office:value-type="string">
            <text:p text:style-name="P78">整理數學式（兩邊同時消去 n₁）：</text:p>
            <text:p text:style-name="P65"/>
            <text:p text:style-name="P78"><text:s text:c="2"/>n₀ + n₁ + n₂ − 1 <text:s/>= <text:s/>n₁ + 2n₂</text:p>
            <text:p text:style-name="P78"><text:s text:c="2"/>↓ <text:s/>兩邊減去 n₁</text:p>
            <text:p text:style-name="P78"><text:s text:c="2"/>n₀ + n₂ − 1 <text:s/>= <text:s/>2n₂</text:p>
            <text:p text:style-name="P78"><text:s text:c="2"/>↓ <text:s/>移項</text:p>
            <text:p text:style-name="P78"><text:s text:c="2"/>n₀ <text:s/>= <text:s/>2n₂ − n₂ + 1 <text:s/>= <text:s/>n₂ + 1</text:p>
            <text:p text:style-name="P65"/>
            <text:p text:style-name="P78"><text:s text:c="2"/>▶ <text:s/>n₀ = n₂ + 1 <text:s text:c="3"/>✔ 得證！</text:p>
          </table:table-cell>
        </table:table-row>
      </table:table>
      <text:p text:style-name="P64"/>
      <text:p text:style-name="P67">完整推導流程一覽</text:p>
      <table:table table:name="表格66" table:style-name="表格66">
        <table:table-column table:style-name="表格66.A"/>
        <table:table-column table:style-name="表格66.B"/>
        <table:table-row table:style-name="表格66.1">
          <table:table-cell table:style-name="表格66.A1" office:value-type="string">
            <text:p text:style-name="P18">定義</text:p>
          </table:table-cell>
          <table:table-cell table:style-name="表格66.B1" office:value-type="string">
            <text:p text:style-name="P79"><text:span text:style-name="T54">n₀ = 葉節點數</text:span>；<text:span text:style-name="T55">n₁ = degree-1 節點數</text:span>；<text:span text:style-name="T57">n₂ = degree-2 節點數</text:span></text:p>
          </table:table-cell>
        </table:table-row>
        <table:table-row table:style-name="表格66.1">
          <table:table-cell table:style-name="表格66.A2" office:value-type="string">
            <text:p text:style-name="P18">步驟1</text:p>
          </table:table-cell>
          <table:table-cell table:style-name="表格66.B2" office:value-type="string">
            <text:p text:style-name="P90">總節點數：n = n₀ + n₁ + n₂</text:p>
          </table:table-cell>
        </table:table-row>
        <table:table-row table:style-name="表格66.1">
          <table:table-cell table:style-name="表格66.A1" office:value-type="string">
            <text:p text:style-name="P18">步驟2</text:p>
          </table:table-cell>
          <table:table-cell table:style-name="表格66.B3" office:value-type="string">
            <text:p text:style-name="P79"><text:span text:style-name="T30">邊數 = n − 1</text:span>（<text:span text:style-name="T26">每個非 root 節點貢獻 1 條邊</text:span>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18">步驟3</text:p>
          </table:table-cell>
          <table:table-cell table:style-name="表格66.B4" office:value-type="string">
            <text:p text:style-name="P79">邊數 = 0×n₀ + 1×n₁ + 2×n₂（每個節點往下貢獻 degree 條邊）</text:p>
          </table:table-cell>
        </table:table-row>
        <table:table-row table:style-name="表格66.1">
          <table:table-cell table:style-name="表格66.A1" office:value-type="string">
            <text:p text:style-name="P18">步驟4</text:p>
          </table:table-cell>
          <table:table-cell table:style-name="表格66.B5" office:value-type="string">
            <text:p text:style-name="P79">令兩式相等：n₀ + n₁ + n₂ − 1 = n₁ + 2n₂</text:p>
          </table:table-cell>
        </table:table-row>
        <table:table-row table:style-name="表格66.1">
          <table:table-cell table:style-name="表格66.A2" office:value-type="string">
            <text:p text:style-name="P18">步驟5</text:p>
          </table:table-cell>
          <table:table-cell table:style-name="表格66.B6" office:value-type="string">
            <text:p text:style-name="P79">消去 n₁ 後移項：<text:span text:style-name="T27">n₀ = n₂ + 1</text:span> <text:s/>✔</text:p>
          </table:table-cell>
        </table:table-row>
      </table:table>
      <text:p text:style-name="P64"/>
      <text:p text:style-name="P67">考試應用（超好用）</text:p>
      <table:table table:name="表格67" table:style-name="表格67">
        <table:table-column table:style-name="表格67.A"/>
        <table:table-row table:style-name="表格67.1">
          <table:table-cell table:style-name="表格67.A1" office:value-type="string">
            <text:p text:style-name="P51">題型：某二元樹<text:span text:style-name="T48">有 20 個 degree=2 的節點</text:span>，請問<text:span text:style-name="T50">有幾個葉節點</text:span>？</text:p>
            <text:p text:style-name="P65"/>
            <text:p text:style-name="P51"><text:s text:c="2"/>直接套公式：n₀ = n₂ + 1 = 20 + 1 = 21 個</text:p>
            <text:p text:style-name="P65"/>
            <text:p text:style-name="P51">反過來也可以：若已知葉節點 15 個，則 degree=2 的節點有 15 − 1 = 14 個</text:p>
          </table:table-cell>
        </table:table-row>
      </table:table>
      <text:p text:style-name="P64"/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40">⚠️ <text:span text:style-name="T17">此公式僅適用於 Binary Tree（二元樹）！</text:span></text:p>
            <text:p text:style-name="P65"/>
            <text:p text:style-name="P40">因為二元樹的 degree 最多為 2，只有 n₀、n₁、n₂ 三種情況。</text:p>
            <text:p text:style-name="P40">若是一般樹（degree 可以是 3、4、5…），這個推導就不成立，必須重新列方程式。</text:p>
          </table:table-cell>
        </table:table-row>
      </table:table>
      <text:h text:style-name="P4" text:outline-level="2"/>
      <text:p text:style-name="P11"/>
      <text:h text:style-name="P3" text:outline-level="2">2.4 公式3 的推導（<text:span text:style-name="T33">2^h − 1</text:span>）</text:h>
      <text:p text:style-name="P34"><text:span text:style-name="T38">每層節點數是等比數列</text:span>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6">第1層：1 = 2^0</text:p>
            <text:p text:style-name="P26">第2層：2 = 2^1</text:p>
            <text:p text:style-name="P26">第3層：4 = 2^2</text:p>
            <text:p text:style-name="P26"><text:s text:c="2"/>...</text:p>
            <text:p text:style-name="P26">第h層：2^(h-1)</text:p>
            <text:p text:style-name="P28">總和 <text:s/>= 1 + 2 + 4 + ... + 2^(h-1) = <text:span text:style-name="T27">2^h − 1 </text:span><text:span text:style-name="T19">(Full Binary Tree（滿二元樹）</text:span><text:span text:style-name="T62">最大節點數 = 2^h − 1</text:span><text:span text:style-name="T19"> → </text:span><text:span text:style-name="T63">高度 h 時，每層全滿</text:span><text:span text:style-name="T19">)</text:span></text:p>
          </table:table-cell>
        </table:table-row>
      </table:table>
      <text:p text:style-name="P11"/>
      <text:h text:style-name="P3" text:outline-level="2">2.5 樹高（height）注意事項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39">⚠️ 高度定義有兩種，考試務必看清楚題目！</text:p>
            <text:p text:style-name="P38"/>
            <text:p text:style-name="P39"><text:span text:style-name="T55">定義一：root 算第 1 層</text:span> → 只有 root 的樹，高度 = 1</text:p>
            <text:p text:style-name="P39"><text:span text:style-name="T55">定義二：root 算第 0 層</text:span> → 只有 root 的樹，高度 = 0</text:p>
            <text:p text:style-name="P38"/>
            <text:p text:style-name="P39">兩種定義差 1，公式結果會不同！</text:p>
          </table:table-cell>
        </table:table-row>
      </table:table>
      <text:p text:style-name="Standard"/>
      <text:h text:style-name="P24" text:outline-level="1">第三章：Binary Search Tree（BST，二元搜尋樹）</text:h>
      <text:h text:style-name="P3" text:outline-level="2">3.1 規則（只有一個）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55">左子樹的所有值 &lt; 根節點值 &lt; 右子樹的所有值</text:p>
            <text:p text:style-name="P52">（<text:span text:style-name="T27">左小、根中、右大</text:span>）</text:p>
          </table:table-cell>
        </table:table-row>
      </table:table>
      <text:p text:style-name="P11"/>
      <text:h text:style-name="P3" text:outline-level="2">3.2 BST 插入範例</text:h>
      <text:p text:style-name="P34">插入順序：50 → 30 → 80 → 40 → 20 → 60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6">插入 50： <text:s text:c="10"/>插入 30（&lt;50 往左）： <text:s text:c="2"/>插入 80（&gt;50 往右）：</text:p>
            <text:p text:style-name="P26"><text:s text:c="3"/>50 <text:s text:c="18"/>50 <text:s text:c="20"/>50</text:p>
            <text:p text:style-name="P26"><text:s text:c="23"/>/ <text:s text:c="21"/>/ <text:s/>\</text:p>
            <text:p text:style-name="P26"><text:s text:c="22"/>30 <text:s text:c="19"/>30 <text:s text:c="3"/>80</text:p>
            <text:p text:style-name="P11"/>
            <text:p text:style-name="P26">插入 40（&gt;30 往右）： <text:s/>插入 20（&lt;30 往左）： <text:s/>插入 60（&gt;50 但&lt;80）：</text:p>
            <text:p text:style-name="P26"><text:s text:c="6"/>50 <text:s text:c="18"/>50 <text:s text:c="19"/>50</text:p>
            <text:p text:style-name="P26"><text:s text:c="5"/>/ <text:s/>\ <text:s text:c="16"/>/ <text:s/>\ <text:s text:c="16"/>/ <text:s/>\</text:p>
            <text:p text:style-name="P26"><text:s text:c="3"/>30 <text:s text:c="3"/>80 <text:s text:c="13"/>30 <text:s text:c="3"/>80 <text:s text:c="12"/>30 <text:s text:c="3"/>80</text:p>
            <text:p text:style-name="P26"><text:s text:c="5"/>\ <text:s text:c="17"/>/ \ <text:s text:c="17"/>/ \ <text:s text:c="2"/>/</text:p>
            <text:p text:style-name="P26"><text:s text:c="5"/>40 <text:s text:c="15"/>20 <text:s/>40 <text:s text:c="13"/>20 <text:s/>40 60</text:p>
          </table:table-cell>
        </table:table-row>
      </table:table>
      <text:p text:style-name="P11"/>
      <text:h text:style-name="P3" text:outline-level="2">3.3 BST 刪除（三種情況）</text:h>
      <text:p text:style-name="P68">Case 1：葉節點 → 直接刪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6">刪除 20：直接移除，父節點的 left 指向 NULL</text:p>
          </table:table-cell>
        </table:table-row>
      </table:table>
      <text:p text:style-name="P68">Case 2：只有一個子節點 → 讓子節點往上接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6">刪除 30（只有右子樹 40）：</text:p>
            <text:p text:style-name="P26"><text:s text:c="3"/>50 <text:s text:c="15"/>50</text:p>
            <text:p text:style-name="P26"><text:s text:c="2"/>/ <text:s/>\ <text:s text:c="6"/>→ <text:s text:c="5"/>/ <text:s/>\</text:p>
            <text:p text:style-name="P26">30 <text:s text:c="3"/>80 <text:s text:c="11"/>40 <text:s text:c="2"/>80</text:p>
            <text:p text:style-name="P26"><text:s text:c="2"/>\</text:p>
            <text:p text:style-name="P26"><text:s text:c="2"/>40</text:p>
          </table:table-cell>
        </table:table-row>
      </table:table>
      <text:p text:style-name="P68">Case 3：有兩個子節點 → 找「右子樹最小值」或「左子樹最大值」補位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6">刪除 50（有左右子樹）：</text:p>
            <text:p text:style-name="P26">方法一：<text:span text:style-name="T64">找右子樹最小值（60）來取代 50</text:span></text:p>
            <text:p text:style-name="P26">方法二：<text:span text:style-name="T65">找左子樹最大值（40）來取代 50</text:span></text:p>
            <text:p text:style-name="P11"/>
            <text:p text:style-name="P26">以方法一為例：</text:p>
            <text:p text:style-name="P26"><text:s text:c="7"/>50 <text:s text:c="18"/>60</text:p>
            <text:p text:style-name="P26"><text:s text:c="6"/>/ <text:s/>\ <text:s text:c="7"/>→ <text:s text:c="7"/>/ <text:s/>\</text:p>
            <text:p text:style-name="P11"><text:soft-page-break/><text:span text:style-name="T44"><text:s text:c="4"/>30 <text:s text:c="3"/>80 <text:s text:c="12"/>30 <text:s text:c="3"/>80</text:span></text:p>
            <text:p text:style-name="P26"><text:s text:c="4"/>/ \ <text:s text:c="2"/>/ <text:s text:c="13"/>/ \</text:p>
            <text:p text:style-name="P26"><text:s text:c="3"/>20 40 60 <text:s text:c="12"/>20 <text:s/>40</text:p>
          </table:table-cell>
        </table:table-row>
      </table:table>
      <text:p text:style-name="P11"/>
      <text:h text:style-name="P5" text:outline-level="2">3.4　BST 退化問題</text:h>
      <text:p text:style-name="P81"><text:span text:style-name="T17">BST 搜尋快的前提是「每次比較都能砍掉一半」</text:span>，<text:span text:style-name="T27">但這個前提要求樹夠平均</text:span>。若<text:span text:style-name="T38">插入順序不佳，樹會退化成直線</text:span>。</text:p>
      <text:p text:style-name="P93"/>
      <text:p text:style-name="P69">退化的三種情況</text:p>
      <text:p text:style-name="P45">① 遞增插入 → 右偏斜樹</text:p>
      <text:p text:style-name="P81">插入 1, 2, 3, 4, 5（每個都比前一個大，全部往右）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9">1</text:p>
            <text:p text:style-name="P29"><text:s/>\</text:p>
            <text:p text:style-name="P29"><text:s text:c="2"/>2</text:p>
            <text:p text:style-name="P29"><text:s text:c="3"/>\</text:p>
            <text:p text:style-name="P29"><text:s text:c="4"/>3 <text:s/>← 搜尋<text:span text:style-name="T48">效率退化為 O(n)</text:span>，不再是 O(log n)</text:p>
            <text:p text:style-name="P29"><text:s text:c="5"/>\</text:p>
            <text:p text:style-name="P29"><text:s text:c="6"/>4</text:p>
            <text:p text:style-name="P29"><text:s text:c="7"/>\</text:p>
            <text:p text:style-name="P29"><text:s text:c="8"/>5</text:p>
          </table:table-cell>
        </table:table-row>
      </table:table>
      <text:p text:style-name="P93"/>
      <text:p text:style-name="P45">② 遞減插入 → 左偏斜樹</text:p>
      <text:p text:style-name="P81">插入 5, 4, 3, 2, 1（每個都比前一個小，全部往左）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9"><text:s text:c="8"/>5</text:p>
            <text:p text:style-name="P29"><text:s text:c="7"/>/</text:p>
            <text:p text:style-name="P29"><text:s text:c="6"/>4</text:p>
            <text:p text:style-name="P29"><text:s text:c="5"/>/</text:p>
            <text:p text:style-name="P29"><text:s text:c="4"/>3</text:p>
            <text:p text:style-name="P29"><text:s text:c="3"/>/</text:p>
            <text:p text:style-name="P29"><text:s text:c="2"/>2</text:p>
            <text:p text:style-name="P29"><text:s/>/</text:p>
            <text:p text:style-name="P29">1</text:p>
          </table:table-cell>
        </table:table-row>
      </table:table>
      <text:p text:style-name="P93"/>
      <text:p text:style-name="P45">③ 鋸齒插入 → 看起來平衡，其實歪了</text:p>
      <text:p text:style-name="P81">插入 10, 1, 9, 2, 8, 3：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9"><text:s text:c="8"/>10</text:p>
            <text:p text:style-name="P29"><text:s text:c="7"/>/</text:p>
            <text:p text:style-name="P29"><text:s text:c="6"/>1</text:p>
            <text:p text:style-name="P29"><text:s text:c="7"/>\</text:p>
            <text:p text:style-name="P29"><text:s text:c="8"/>9</text:p>
            <text:p text:style-name="P29"><text:s text:c="7"/>/</text:p>
            <text:p text:style-name="P94"><text:soft-page-break/><text:span text:style-name="T44"><text:s text:c="6"/>2</text:span></text:p>
            <text:p text:style-name="P29"><text:s text:c="7"/>\</text:p>
            <text:p text:style-name="P29"><text:s text:c="8"/>8</text:p>
            <text:p text:style-name="P29"><text:s text:c="7"/>/</text:p>
            <text:p text:style-name="P29"><text:s text:c="6"/>3 <text:s text:c="7"/>← 長歪但不明顯，一樣退化</text:p>
          </table:table-cell>
        </table:table-row>
      </table:table>
      <text:p text:style-name="P93"/>
      <text:p text:style-name="P69">退化前後效能對比</text:p>
      <table:table table:name="表格69" table:style-name="表格69">
        <table:table-column table:style-name="表格69.A"/>
        <table:table-column table:style-name="表格69.B"/>
        <table:table-column table:style-name="表格69.C"/>
        <table:table-row table:style-name="表格69.1">
          <table:table-cell table:style-name="表格69.A1" office:value-type="string">
            <text:p text:style-name="P19">操作</text:p>
          </table:table-cell>
          <table:table-cell table:style-name="表格69.A1" office:value-type="string">
            <text:p text:style-name="P19"><text:span text:style-name="T48">正常</text:span> BST（平衡）</text:p>
          </table:table-cell>
          <table:table-cell table:style-name="表格69.A1" office:value-type="string">
            <text:p text:style-name="P19"><text:span text:style-name="T50">退化</text:span> BST</text:p>
          </table:table-cell>
        </table:table-row>
        <table:table-row table:style-name="表格69.1">
          <table:table-cell table:style-name="表格69.A2" office:value-type="string">
            <text:p text:style-name="P81">搜尋</text:p>
          </table:table-cell>
          <table:table-cell table:style-name="表格69.B2" office:value-type="string">
            <text:p text:style-name="P56">O(<text:span text:style-name="T48">log n</text:span>)</text:p>
          </table:table-cell>
          <table:table-cell table:style-name="表格69.C2" office:value-type="string">
            <text:p text:style-name="P63">O(n)</text:p>
          </table:table-cell>
        </table:table-row>
        <table:table-row table:style-name="表格69.1">
          <table:table-cell table:style-name="表格69.A3" office:value-type="string">
            <text:p text:style-name="P81">插入</text:p>
          </table:table-cell>
          <table:table-cell table:style-name="表格69.B2" office:value-type="string">
            <text:p text:style-name="P56">O(<text:span text:style-name="T48">log n</text:span>)</text:p>
          </table:table-cell>
          <table:table-cell table:style-name="表格69.C2" office:value-type="string">
            <text:p text:style-name="P63">O(n)</text:p>
          </table:table-cell>
        </table:table-row>
        <table:table-row table:style-name="表格69.1">
          <table:table-cell table:style-name="表格69.A4" office:value-type="string">
            <text:p text:style-name="P81">刪除</text:p>
          </table:table-cell>
          <table:table-cell table:style-name="表格69.B2" office:value-type="string">
            <text:p text:style-name="P56">O(<text:span text:style-name="T48">log n</text:span>)</text:p>
          </table:table-cell>
          <table:table-cell table:style-name="表格69.C2" office:value-type="string">
            <text:p text:style-name="P63">O(n)</text:p>
          </table:table-cell>
        </table:table-row>
      </table:table>
      <text:p text:style-name="P93"/>
      <table:table table:name="表格70" table:style-name="表格70">
        <table:table-column table:style-name="表格70.A"/>
        <table:table-row table:style-name="表格70.1">
          <table:table-cell table:style-name="表格70.A1" office:value-type="string">
            <text:p text:style-name="P15">📊 實際感受：10 萬筆資料</text:p>
            <text:p text:style-name="P15"><text:s/><text:span text:style-name="T27"><text:s/>正常 BST（平衡）：約 log₂(100000) ≈ 17 步找到</text:span></text:p>
            <text:p text:style-name="P15"><text:s text:c="2"/>退化 BST：最多 100,000 步 ← 慢了將近 6000 倍！</text:p>
          </table:table-cell>
        </table:table-row>
      </table:table>
      <text:p text:style-name="P93"/>
      <text:h text:style-name="P5" text:outline-level="2">3.5　偏斜樹（Skewed Tree）為什麼最浪費空間？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41"><text:span text:style-name="T55">偏斜樹</text:span> = <text:span text:style-name="T17">所有節點只有左子節點，或只有右子節點</text:span></text:p>
            <text:p text:style-name="P41">→ <text:span text:style-name="T38">形狀等同 Linked List</text:span></text:p>
            <text:p text:style-name="P41">→ 高度 h 時只有 h 個節點（最少）</text:p>
          </table:table-cell>
        </table:table-row>
      </table:table>
      <text:p text:style-name="P93"/>
      <text:p text:style-name="P81">如果<text:span text:style-name="T67">用陣列儲存</text:span><text:span text:style-name="T59">右偏斜樹</text:span>（5 個節點），節點會落在哪些 index？</text:p>
      <table:table table:name="表格72" table:style-name="表格72">
        <table:table-column table:style-name="表格72.A"/>
        <table:table-row table:style-name="表格72.1">
          <table:table-cell table:style-name="表格72.A1" office:value-type="string">
            <text:p text:style-name="P29">節點1 在 index=1</text:p>
            <text:p text:style-name="P29">節點2 在 index=3 <text:s/>（1 的右子 = <text:span text:style-name="T54">2×1+1</text:span> = 3）</text:p>
            <text:p text:style-name="P29">節點3 在 index=7 <text:s/>（3 的右子 = <text:span text:style-name="T54">2×3+1</text:span> = 7）</text:p>
            <text:p text:style-name="P29">節點4 在 index=15 （7 的右子 = <text:span text:style-name="T54">2×7+1</text:span> = 15）</text:p>
            <text:p text:style-name="P29">節點5 在 index=31 （15的右子 = <text:span text:style-name="T54">2×15+1</text:span> = 31）</text:p>
            <text:p text:style-name="P94"/>
            <text:p text:style-name="P29">陣列：</text:p>
            <text:p text:style-name="P29">index: <text:s/>1 <text:s/>2 <text:s/>3 <text:s/>4 <text:s/>5 <text:s/>6 <text:s/>7 <text:s/>8 ... 14 <text:s/>15 <text:s/>16 ... 30 <text:s/>31</text:p>
            <text:p text:style-name="P29">value: <text:s/>1 <text:s/>- <text:s/>2 <text:s/>- <text:s/>- <text:s/>- <text:s/>3 <text:s/>- <text:s/>... <text:s/>- 4 <text:s text:c="2"/>- <text:s/>... <text:s/>- <text:s text:c="2"/>5</text:p>
            <text:p text:style-name="P29"><text:s text:c="14"/>↑ <text:s text:c="10"/>↑ <text:s text:c="11"/>↑ <text:s text:c="14"/>↑</text:p>
            <text:p text:style-name="P29"><text:s text:c="13"/>節點2 <text:s text:c="6"/>節點3 <text:s text:c="7"/>節點4 <text:s text:c="11"/>節點5</text:p>
            <text:p text:style-name="P94"/>
            <text:p text:style-name="P29"><text:span text:style-name="T66">5 個節點，卻佔用 2^5 - 1 = 31 格</text:span>，<text:span text:style-name="T46">浪費 26 格！</text:span></text:p>
          </table:table-cell>
        </table:table-row>
      </table:table>
      <text:p text:style-name="P93"/>
      <table:table table:name="表格73" table:style-name="表格73">
        <table:table-column table:style-name="表格73.A"/>
        <table:table-column table:style-name="表格73.B" table:number-columns-repeated="2"/>
        <table:table-column table:style-name="表格73.D"/>
        <table:table-row table:style-name="表格73.1">
          <table:table-cell table:style-name="表格73.A1" office:value-type="string">
            <text:p text:style-name="P19">節點數 n</text:p>
          </table:table-cell>
          <table:table-cell table:style-name="表格73.A1" office:value-type="string">
            <text:p text:style-name="P19">需要陣列格數</text:p>
          </table:table-cell>
          <table:table-cell table:style-name="表格73.A1" office:value-type="string">
            <text:p text:style-name="P19">浪費格數</text:p>
          </table:table-cell>
          <table:table-cell table:style-name="表格73.A1" office:value-type="string">
            <text:p text:style-name="P19">空間利用率</text:p>
          </table:table-cell>
        </table:table-row>
        <text:soft-page-break/>
        <table:table-row table:style-name="表格73.1">
          <table:table-cell table:style-name="表格73.A2" office:value-type="string">
            <text:p text:style-name="P81">3</text:p>
          </table:table-cell>
          <table:table-cell table:style-name="表格73.B2" office:value-type="string">
            <text:p text:style-name="P81">7</text:p>
          </table:table-cell>
          <table:table-cell table:style-name="表格73.C2" office:value-type="string">
            <text:p text:style-name="P61">4</text:p>
          </table:table-cell>
          <table:table-cell table:style-name="表格73.C2" office:value-type="string">
            <text:p text:style-name="P62">43%</text:p>
          </table:table-cell>
        </table:table-row>
        <table:table-row table:style-name="表格73.1">
          <table:table-cell table:style-name="表格73.A3" office:value-type="string">
            <text:p text:style-name="P81">5</text:p>
          </table:table-cell>
          <table:table-cell table:style-name="表格73.B3" office:value-type="string">
            <text:p text:style-name="P81">31</text:p>
          </table:table-cell>
          <table:table-cell table:style-name="表格73.C2" office:value-type="string">
            <text:p text:style-name="P61">26</text:p>
          </table:table-cell>
          <table:table-cell table:style-name="表格73.C2" office:value-type="string">
            <text:p text:style-name="P62">16%</text:p>
          </table:table-cell>
        </table:table-row>
        <table:table-row table:style-name="表格73.1">
          <table:table-cell table:style-name="表格73.A4" office:value-type="string">
            <text:p text:style-name="P81">10</text:p>
          </table:table-cell>
          <table:table-cell table:style-name="表格73.B4" office:value-type="string">
            <text:p text:style-name="P81">1,023</text:p>
          </table:table-cell>
          <table:table-cell table:style-name="表格73.C2" office:value-type="string">
            <text:p text:style-name="P61">1,013</text:p>
          </table:table-cell>
          <table:table-cell table:style-name="表格73.C2" office:value-type="string">
            <text:p text:style-name="P62">&lt; 1%</text:p>
          </table:table-cell>
        </table:table-row>
      </table:table>
      <text:p text:style-name="P93"/>
      <text:h text:style-name="P5" text:outline-level="2">3.6　<text:span text:style-name="T50">解決方法：平衡樹</text:span></text:h>
      <text:p text:style-name="P81"><text:span text:style-name="T27">只要讓樹「自動保持平衡」</text:span>，<text:span text:style-name="T17">就能確保搜尋永遠是 O(log n)</text:span>。</text:p>
      <text:p text:style-name="P93"/>
      <text:p text:style-name="P69">① AVL Tree（最嚴格）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72">強制規定：任何節點的左右子樹高度差 ≤ 1</text:p>
            <text:p text:style-name="P72">違反時立即「旋轉」調整</text:p>
          </table:table-cell>
        </table:table-row>
      </table:table>
      <text:p text:style-name="P81">例：插入 1, 2, 3 時，偵測到不平衡 → 自動 RR 旋轉：</text:p>
      <table:table table:name="表格75" table:style-name="表格75">
        <table:table-column table:style-name="表格75.A" table:number-columns-repeated="2"/>
        <table:table-row table:style-name="表格75.1">
          <table:table-cell table:style-name="表格75.A1" office:value-type="string">
            <text:p text:style-name="P58">旋轉前（不平衡）</text:p>
            <table:table table:name="表格76" table:style-name="表格76">
              <table:table-column table:style-name="表格76.A"/>
              <table:table-row table:style-name="表格76.1">
                <table:table-cell table:style-name="表格76.A1" office:value-type="string">
                  <text:p text:style-name="P29"><text:s text:c="2"/>1 <text:s text:c="3"/>← 左子樹高度=0</text:p>
                  <text:p text:style-name="P29"><text:s/>\ <text:s text:c="4"/>← 右子樹高度=2，差值=2！</text:p>
                  <text:p text:style-name="P29"><text:s text:c="2"/>2</text:p>
                  <text:p text:style-name="P29"><text:s/>\</text:p>
                  <text:p text:style-name="P29"><text:s text:c="2"/>3</text:p>
                </table:table-cell>
              </table:table-row>
            </table:table>
            <text:p text:style-name="P95"/>
          </table:table-cell>
          <table:table-cell table:style-name="表格75.B1" office:value-type="string">
            <text:p text:style-name="P47">旋轉後（平衡）</text:p>
            <table:table table:name="表格77" table:style-name="表格77">
              <table:table-column table:style-name="表格77.A"/>
              <table:table-row table:style-name="表格77.1">
                <table:table-cell table:style-name="表格77.A1" office:value-type="string">
                  <text:p text:style-name="P29"><text:s text:c="4"/>2 <text:s text:c="2"/>← 左右子樹高度各=1</text:p>
                  <text:p text:style-name="P29"><text:s text:c="3"/>/ \</text:p>
                  <text:p text:style-name="P29"><text:s text:c="2"/>1 <text:s text:c="2"/>3</text:p>
                </table:table-cell>
              </table:table-row>
            </table:table>
            <text:p text:style-name="P95"/>
          </table:table-cell>
        </table:table-row>
      </table:table>
      <text:p text:style-name="P93"/>
      <text:p text:style-name="P81">四種旋轉類型：</text:p>
      <table:table table:name="表格78" table:style-name="表格78">
        <table:table-column table:style-name="表格78.A"/>
        <table:table-column table:style-name="表格78.B"/>
        <table:table-column table:style-name="表格78.C"/>
        <table:table-row table:style-name="表格78.1">
          <table:table-cell table:style-name="表格78.A1" office:value-type="string">
            <text:p text:style-name="P19">旋轉類型</text:p>
          </table:table-cell>
          <table:table-cell table:style-name="表格78.A1" office:value-type="string">
            <text:p text:style-name="P19">發生條件</text:p>
          </table:table-cell>
          <table:table-cell table:style-name="表格78.A1" office:value-type="string">
            <text:p text:style-name="P19">操作</text:p>
          </table:table-cell>
        </table:table-row>
        <table:table-row table:style-name="表格78.1">
          <table:table-cell table:style-name="表格78.A2" office:value-type="string">
            <text:p text:style-name="P9">LL 旋轉</text:p>
          </table:table-cell>
          <table:table-cell table:style-name="表格78.B2" office:value-type="string">
            <text:p text:style-name="P81">新節點在左子樹的左邊</text:p>
          </table:table-cell>
          <table:table-cell table:style-name="表格78.C2" office:value-type="string">
            <text:p text:style-name="P81">對失衡節點做一次右旋</text:p>
          </table:table-cell>
        </table:table-row>
        <table:table-row table:style-name="表格78.1">
          <table:table-cell table:style-name="表格78.A3" office:value-type="string">
            <text:p text:style-name="P9">RR 旋轉</text:p>
          </table:table-cell>
          <table:table-cell table:style-name="表格78.B3" office:value-type="string">
            <text:p text:style-name="P81">新節點在右子樹的右邊</text:p>
          </table:table-cell>
          <table:table-cell table:style-name="表格78.C3" office:value-type="string">
            <text:p text:style-name="P81">對失衡節點做一次左旋</text:p>
          </table:table-cell>
        </table:table-row>
        <table:table-row table:style-name="表格78.1">
          <table:table-cell table:style-name="表格78.A4" office:value-type="string">
            <text:p text:style-name="P9">LR 旋轉</text:p>
          </table:table-cell>
          <table:table-cell table:style-name="表格78.B4" office:value-type="string">
            <text:p text:style-name="P81">新節點在左子樹的右邊</text:p>
          </table:table-cell>
          <table:table-cell table:style-name="表格78.C4" office:value-type="string">
            <text:p text:style-name="P81">先左旋再右旋（兩次）</text:p>
          </table:table-cell>
        </table:table-row>
        <table:table-row table:style-name="表格78.1">
          <table:table-cell table:style-name="表格78.A5" office:value-type="string">
            <text:p text:style-name="P9">RL 旋轉</text:p>
          </table:table-cell>
          <table:table-cell table:style-name="表格78.B5" office:value-type="string">
            <text:p text:style-name="P81">新節點在右子樹的左邊</text:p>
          </table:table-cell>
          <table:table-cell table:style-name="表格78.C5" office:value-type="string">
            <text:p text:style-name="P81">先右旋再左旋（兩次）</text:p>
          </table:table-cell>
        </table:table-row>
      </table:table>
      <text:p text:style-name="P93"/>
      <text:p text:style-name="P69">② Red-Black Tree（實務最常用）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99">規則比 AVL Tree 寬鬆，不要求嚴格平衡，旋轉次數更少</text:p>
            <text:p text:style-name="P99">平均效能比 AVL Tree 更穩定，適合頻繁插入刪除的場景</text:p>
            <text:p text:style-name="P96"/>
            <text:p text:style-name="P99">實際應用：</text:p>
            <text:p text:style-name="P99"><text:s text:c="2"/>✔ C++ STL 的 std::map、std::set</text:p>
            <text:p text:style-name="P99"><text:s text:c="2"/>✔ Java 的 TreeMap、TreeSet</text:p>
            <text:p text:style-name="P99"><text:s text:c="2"/>✔ Linux 核心的行程排程器</text:p>
          </table:table-cell>
        </table:table-row>
      </table:table>
      <text:p text:style-name="P93"><text:soft-page-break/></text:p>
      <text:p text:style-name="P69">③ B-Tree / B+Tree（資料庫專用）</text:p>
      <table:table table:name="表格80" table:style-name="表格80">
        <table:table-column table:style-name="表格80.A"/>
        <table:table-row table:style-name="表格80.1">
          <table:table-cell table:style-name="表格80.A1" office:value-type="string">
            <text:p text:style-name="P72">每個節點可以有很多 key（不只 2 個）</text:p>
            <text:p text:style-name="P72">專為磁碟讀取最佳化：一次讀一個節點 = 一次磁碟 I/O</text:p>
            <text:p text:style-name="P96"/>
            <text:p text:style-name="P72">實際應用：</text:p>
            <text:p text:style-name="P72"><text:s text:c="2"/>✔ MySQL、PostgreSQL 的索引（Index）</text:p>
            <text:p text:style-name="P72"><text:s text:c="2"/>✔ 檔案系統（NTFS、ext4）</text:p>
          </table:table-cell>
        </table:table-row>
      </table:table>
      <text:p text:style-name="P93"/>
      <text:p text:style-name="P69">三種平衡樹比較</text:p>
      <table:table table:name="表格81" table:style-name="表格81">
        <table:table-column table:style-name="表格81.A"/>
        <table:table-column table:style-name="表格81.B" table:number-columns-repeated="3"/>
        <table:table-row table:style-name="表格81.1">
          <table:table-cell table:style-name="表格81.A1" office:value-type="string">
            <text:p text:style-name="P97"/>
          </table:table-cell>
          <table:table-cell table:style-name="表格81.A1" office:value-type="string">
            <text:p text:style-name="P19">AVL Tree</text:p>
          </table:table-cell>
          <table:table-cell table:style-name="表格81.A1" office:value-type="string">
            <text:p text:style-name="P19">Red-Black Tree</text:p>
          </table:table-cell>
          <table:table-cell table:style-name="表格81.A1" office:value-type="string">
            <text:p text:style-name="P19">B-Tree</text:p>
          </table:table-cell>
        </table:table-row>
        <table:table-row table:style-name="表格81.1">
          <table:table-cell table:style-name="表格81.A2" office:value-type="string">
            <text:p text:style-name="P19">嚴格程度</text:p>
          </table:table-cell>
          <table:table-cell table:style-name="表格81.B2" office:value-type="string">
            <text:p text:style-name="P81">最嚴格</text:p>
          </table:table-cell>
          <table:table-cell table:style-name="表格81.C2" office:value-type="string">
            <text:p text:style-name="P81">較寬鬆</text:p>
          </table:table-cell>
          <table:table-cell table:style-name="表格81.D2" office:value-type="string">
            <text:p text:style-name="P81">依階數</text:p>
          </table:table-cell>
        </table:table-row>
        <table:table-row table:style-name="表格81.1">
          <table:table-cell table:style-name="表格81.A2" office:value-type="string">
            <text:p text:style-name="P19">搜尋速度</text:p>
          </table:table-cell>
          <table:table-cell table:style-name="表格81.B3" office:value-type="string">
            <text:p text:style-name="P81">最快</text:p>
          </table:table-cell>
          <table:table-cell table:style-name="表格81.C3" office:value-type="string">
            <text:p text:style-name="P81">略慢</text:p>
          </table:table-cell>
          <table:table-cell table:style-name="表格81.D3" office:value-type="string">
            <text:p text:style-name="P81">磁碟最優</text:p>
          </table:table-cell>
        </table:table-row>
        <table:table-row table:style-name="表格81.1">
          <table:table-cell table:style-name="表格81.A2" office:value-type="string">
            <text:p text:style-name="P19">插入刪除</text:p>
          </table:table-cell>
          <table:table-cell table:style-name="表格81.B4" office:value-type="string">
            <text:p text:style-name="P81">較慢（旋轉多）</text:p>
          </table:table-cell>
          <table:table-cell table:style-name="表格81.C4" office:value-type="string">
            <text:p text:style-name="P81">較快</text:p>
          </table:table-cell>
          <table:table-cell table:style-name="表格81.D4" office:value-type="string">
            <text:p text:style-name="P81">磁碟最優</text:p>
          </table:table-cell>
        </table:table-row>
        <table:table-row table:style-name="表格81.1">
          <table:table-cell table:style-name="表格81.A2" office:value-type="string">
            <text:p text:style-name="P19">主要用途</text:p>
          </table:table-cell>
          <table:table-cell table:style-name="表格81.B5" office:value-type="string">
            <text:p text:style-name="P81">記憶體搜尋</text:p>
          </table:table-cell>
          <table:table-cell table:style-name="表格81.C5" office:value-type="string">
            <text:p text:style-name="P81">STL / Java</text:p>
          </table:table-cell>
          <table:table-cell table:style-name="表格81.D5" office:value-type="string">
            <text:p text:style-name="P81">資料庫索引</text:p>
          </table:table-cell>
        </table:table-row>
      </table:table>
      <text:p text:style-name="P93"/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53">🎯 一句話記住核心：</text:p>
            <text:p text:style-name="P53">BST 不保證平衡，插入順序決定形狀；</text:p>
            <text:p text:style-name="P53">要保證 O(log n) 就必須用 AVL Tree 或 Red-Black Tree。</text:p>
          </table:table-cell>
        </table:table-row>
      </table:table>
      <text:p text:style-name="P98"/>
      <text:p text:style-name="P98"/>
      <text:h text:style-name="P6" text:outline-level="2"/>
      <table:table table:name="表格83" table:style-name="表格83">
        <table:table-column table:style-name="表格83.A"/>
        <table:table-row table:style-name="表格83.1">
          <table:table-cell table:style-name="表格83.A1" office:value-type="string">
            <text:p text:style-name="P42">先搞清楚：AVL Tree 和 Red-Black Tree 是二元樹（每節點最多 2 個小孩）</text:p>
            <text:p text:style-name="P42">但 B-Tree 不是二元樹！每個節點可以有很多小孩，是「多元樹（M-ary Tree）」</text:p>
          </table:table-cell>
        </table:table-row>
      </table:table>
      <text:p text:style-name="P108"/>
      <text:p text:style-name="P110"/>
      <text:h text:style-name="P25" text:outline-level="1">第三章附：AVL Tree 完整介紹</text:h>
      <table:table table:name="表格84" table:style-name="表格84">
        <table:table-column table:style-name="表格84.A"/>
        <table:table-row table:style-name="表格84.1">
          <table:table-cell table:style-name="表格84.A1" office:value-type="string">
            <text:p text:style-name="P73"><text:span text:style-name="T55">AVL Tree</text:span> = <text:span text:style-name="T8">自動保持平衡</text:span>的 <text:span text:style-name="T38">BST（Binary Search Tree）</text:span></text:p>
            <text:p text:style-name="P73">✔<text:span text:style-name="T77"> 是二元樹</text:span>（每節點最多 2 個 child）</text:p>
            <text:p text:style-name="P73">✔ 同時也是 <text:span text:style-name="T27">BST（左 &lt; 根 &lt; 右）</text:span></text:p>
            <text:p text:style-name="P73">✔ 額外保證：<text:span text:style-name="T40">任何節點的「平衡因子」絕對值 </text:span><text:span text:style-name="T10">≤ 1</text:span></text:p>
          </table:table-cell>
        </table:table-row>
      </table:table>
      <text:p text:style-name="P108"/>
      <text:h text:style-name="P6" text:outline-level="2">AVL-1　平衡因子（Balance Factor）</text:h>
      <text:p text:style-name="P82"><text:span text:style-name="T50">每個節點都有一個平衡因子</text:span>，計算方式：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16">平衡因子（BF）= 左子樹高度 − 右子樹高度</text:p>
            <text:p text:style-name="P111"/>
            <text:p text:style-name="P16">BF = <text:s/>0 <text:s/>→ 左右一樣高，完全平衡</text:p>
            <text:p text:style-name="P16">BF = <text:s/>1 <text:s/>→ 左邊比右邊高 1，仍然合法</text:p>
            <text:p text:style-name="P16">BF = -1 <text:s/>→ 右邊比左邊高 1，仍然合法</text:p>
            <text:p text:style-name="P91">BF ≥ 2 或 ≤ -2 <text:s/>→ 失衡！必須旋轉修復</text:p>
          </table:table-cell>
        </table:table-row>
      </table:table>
      <text:p text:style-name="P108"/>
      <text:p text:style-name="P82">用圖說明（數字是平衡因子）：</text:p>
      <table:table table:name="表格86" table:style-name="表格86">
        <table:table-column table:style-name="表格86.A"/>
        <table:table-row table:style-name="表格86.1">
          <table:table-cell table:style-name="表格86.A1" office:value-type="string">
            <text:p text:style-name="P30"><text:s text:c="8"/>30 (BF=1) <text:s text:c="9"/>← 左高度2，右高度1，差=1 合法</text:p>
            <text:p text:style-name="P30"><text:s text:c="7"/>/ <text:s/>\</text:p>
            <text:p text:style-name="P30"><text:s text:c="4"/>20(1) <text:s/>40(0) <text:s text:c="10"/>← BF 都在 -1~1 之間</text:p>
            <text:p text:style-name="P30"><text:s text:c="3"/>/</text:p>
            <text:p text:style-name="P30"><text:s text:c="2"/>10(0)</text:p>
          </table:table-cell>
        </table:table-row>
      </table:table>
      <text:p text:style-name="P108"/>
      <text:h text:style-name="P6" text:outline-level="2">AVL-2　四種旋轉（超重要，考試必考）</text:h>
      <text:p text:style-name="P82"><text:span text:style-name="T68">只要插入或刪除後有節點的 BF 超出範圍</text:span>，<text:span text:style-name="T55">就立刻旋轉修復</text:span>。共有 4 種情況：</text:p>
      <text:p text:style-name="P108"/>
      <text:p text:style-name="P70">旋轉一：LL 旋轉（新節點插入在<text:span text:style-name="T50">失衡節點左子樹</text:span>的左邊）</text:p>
      <text:p text:style-name="P82">解法：對失衡節點做一次「右旋（Right Rotation）」</text:p>
      <table:table table:name="表格87" table:style-name="表格87">
        <table:table-column table:style-name="表格87.A" table:number-columns-repeated="2"/>
        <table:table-row table:style-name="表格87.1">
          <table:table-cell table:style-name="表格87.A1" office:value-type="string">
            <text:p text:style-name="P59">插入前（失衡）</text:p>
            <table:table table:name="表格88" table:style-name="表格88">
              <table:table-column table:style-name="表格88.A"/>
              <table:table-row table:style-name="表格88.1">
                <table:table-cell table:style-name="表格88.A1" office:value-type="string">
                  <text:p text:style-name="P30"><text:s text:c="4"/>30 (BF=2) ← 失衡！</text:p>
                  <text:p text:style-name="P30"><text:s text:c="3"/>/</text:p>
                  <text:p text:style-name="P30"><text:s/><text:span text:style-name="T69"><text:s/>20</text:span> (BF=1)</text:p>
                  <text:p text:style-name="P30"><text:s/>/</text:p>
                  <text:p text:style-name="P30">10 <text:s text:c="11"/>← 新插入節點</text:p>
                </table:table-cell>
              </table:table-row>
            </table:table>
            <text:p text:style-name="P110"/>
          </table:table-cell>
          <table:table-cell table:style-name="表格87.B1" office:value-type="string">
            <text:p text:style-name="P48">右旋後（平衡）</text:p>
            <table:table table:name="表格89" table:style-name="表格89">
              <table:table-column table:style-name="表格89.A"/>
              <table:table-row table:style-name="表格89.1">
                <table:table-cell table:style-name="表格89.A1" office:value-type="string">
                  <text:p text:style-name="P30"><text:s text:c="4"/>20 (BF=0)</text:p>
                  <text:p text:style-name="P30"><text:s text:c="3"/>/ <text:s/>\</text:p>
                  <text:p text:style-name="P30"><text:s text:c="2"/>10 <text:s text:c="2"/>30</text:p>
                  <text:p text:style-name="P113"/>
                  <text:p text:style-name="P30">20 變成新的根，</text:p>
                  <text:p text:style-name="P30">30 變成 20 的右子</text:p>
                </table:table-cell>
              </table:table-row>
            </table:table>
            <text:p text:style-name="P110"/>
          </table:table-cell>
        </table:table-row>
      </table:table>
      <text:p text:style-name="P108"/>
      <text:p text:style-name="P70">旋轉二：RR 旋轉（新節點插入在<text:span text:style-name="T50">失衡節點右子樹</text:span>的右邊）</text:p>
      <text:p text:style-name="P82">解法：對失衡節點做一次「左旋（Left Rotation）」</text:p>
      <table:table table:name="表格90" table:style-name="表格90">
        <table:table-column table:style-name="表格90.A" table:number-columns-repeated="2"/>
        <text:soft-page-break/>
        <table:table-row table:style-name="表格90.1">
          <table:table-cell table:style-name="表格90.A1" office:value-type="string">
            <text:p text:style-name="P59">插入前（失衡）</text:p>
            <table:table table:name="表格91" table:style-name="表格91">
              <table:table-column table:style-name="表格91.A"/>
              <table:table-row table:style-name="表格91.1">
                <table:table-cell table:style-name="表格91.A1" office:value-type="string">
                  <text:p text:style-name="P30"><text:s text:c="2"/>10 (BF=-2) ← 失衡！</text:p>
                  <text:p text:style-name="P30"><text:s text:c="4"/>\</text:p>
                  <text:p text:style-name="P30"><text:s text:c="4"/><text:span text:style-name="T69">20</text:span> (BF=-1)</text:p>
                  <text:p text:style-name="P30"><text:s text:c="6"/>\</text:p>
                  <text:p text:style-name="P30"><text:s text:c="6"/>30 <text:s text:c="4"/>← 新插入節點</text:p>
                </table:table-cell>
              </table:table-row>
            </table:table>
            <text:p text:style-name="P110"/>
          </table:table-cell>
          <table:table-cell table:style-name="表格90.B1" office:value-type="string">
            <text:p text:style-name="P48">左旋後（平衡）</text:p>
            <table:table table:name="表格92" table:style-name="表格92">
              <table:table-column table:style-name="表格92.A"/>
              <table:table-row table:style-name="表格92.1">
                <table:table-cell table:style-name="表格92.A1" office:value-type="string">
                  <text:p text:style-name="P30"><text:s text:c="4"/>20 (BF=0)</text:p>
                  <text:p text:style-name="P30"><text:s text:c="3"/>/ <text:s/>\</text:p>
                  <text:p text:style-name="P30"><text:s text:c="2"/>10 <text:s text:c="2"/>30</text:p>
                  <text:p text:style-name="P113"/>
                  <text:p text:style-name="P30">20 變成新的根，</text:p>
                  <text:p text:style-name="P30">10 變成 20 的左子</text:p>
                </table:table-cell>
              </table:table-row>
            </table:table>
            <text:p text:style-name="P110"/>
          </table:table-cell>
        </table:table-row>
      </table:table>
      <text:p text:style-name="P108"/>
      <text:p text:style-name="P70">旋轉三：<text:span text:style-name="T50">LR </text:span>旋轉（新節點插入在<text:span text:style-name="T50">失衡節點左子樹</text:span>的右邊）</text:p>
      <text:p text:style-name="P82">解法：<text:span text:style-name="T27">先對左子節點做左旋</text:span>，<text:span text:style-name="T17">再對失衡節點做右旋</text:span>（共兩次旋轉）</text:p>
      <table:table table:name="表格93" table:style-name="表格93">
        <table:table-column table:style-name="表格93.A"/>
        <table:table-row table:style-name="表格93.1">
          <table:table-cell table:style-name="表格93.A1" office:value-type="string">
            <text:p text:style-name="P30">插入前（失衡）： <text:s text:c="9"/>第一步：<text:span text:style-name="T61">左旋</text:span> 20： <text:s text:c="5"/>第二步：<text:span text:style-name="T61">右旋</text:span> 30：</text:p>
            <text:p text:style-name="P30"><text:s text:c="4"/>30 (BF=2) <text:s text:c="16"/>30 (BF=2) <text:s text:c="13"/><text:span text:style-name="T55">25</text:span> (BF=0)</text:p>
            <text:p text:style-name="P30"><text:s text:c="3"/>/ <text:s text:c="24"/>/ <text:s text:c="21"/>/ <text:s/>\</text:p>
            <text:p text:style-name="P30"><text:s text:c="2"/><text:span text:style-name="T69">20</text:span> (BF=-1) <text:s text:c="14"/><text:span text:style-name="T55">25</text:span> (BF=1) <text:s text:c="11"/>20 <text:s text:c="4"/><text:span text:style-name="T55">30</text:span></text:p>
            <text:p text:style-name="P30"><text:s text:c="4"/>\ <text:s text:c="21"/>/</text:p>
            <text:p text:style-name="P30"><text:s text:c="4"/>25 <text:s/>← 新節點 <text:s text:c="8"/><text:span text:style-name="T55">20</text:span></text:p>
          </table:table-cell>
        </table:table-row>
      </table:table>
      <text:p text:style-name="P108"/>
      <text:p text:style-name="P70">旋轉四：<text:span text:style-name="T50">RL</text:span> 旋轉（新節點插入在<text:span text:style-name="T50">失衡節點右子樹</text:span>的左邊）</text:p>
      <text:p text:style-name="P82">解法：先對右子節點做右旋，再對失衡節點做左旋（共兩次旋轉）</text:p>
      <table:table table:name="表格94" table:style-name="表格94">
        <table:table-column table:style-name="表格94.A"/>
        <table:table-row table:style-name="表格94.1">
          <table:table-cell table:style-name="表格94.A1" office:value-type="string">
            <text:p text:style-name="P30">插入前（失衡）： <text:s text:c="9"/>第一步：右旋 40： <text:s text:c="5"/>第二步：左旋 20：</text:p>
            <text:p text:style-name="P30"><text:s text:c="2"/>20 (BF=-2) <text:s text:c="15"/>20 (BF=-2) <text:s text:c="13"/>25 (BF=0)</text:p>
            <text:p text:style-name="P30"><text:s text:c="4"/>\ <text:s text:c="24"/>\ <text:s text:c="19"/>/ <text:s/>\</text:p>
            <text:p text:style-name="P30"><text:s text:c="4"/>40 (BF=1) <text:s text:c="16"/>25 (BF=-1) <text:s text:c="8"/>20 <text:s text:c="4"/>40</text:p>
            <text:p text:style-name="P30"><text:s text:c="3"/>/ <text:s text:c="27"/>\</text:p>
            <text:p text:style-name="P30"><text:s text:c="2"/>25 <text:s/>← 新節點 <text:s text:c="18"/>40</text:p>
          </table:table-cell>
        </table:table-row>
      </table:table>
      <text:p text:style-name="P108"/>
      <text:h text:style-name="P6" text:outline-level="2">AVL-3　四種旋轉總整理表</text:h>
      <table:table table:name="表格95" table:style-name="表格95">
        <table:table-column table:style-name="表格95.A"/>
        <table:table-column table:style-name="表格95.B"/>
        <table:table-column table:style-name="表格95.C"/>
        <table:table-column table:style-name="表格95.D"/>
        <table:table-row table:style-name="表格95.1">
          <table:table-cell table:style-name="表格95.A1" office:value-type="string">
            <text:p text:style-name="P20">旋轉類型</text:p>
          </table:table-cell>
          <table:table-cell table:style-name="表格95.A1" office:value-type="string">
            <text:p text:style-name="P20">BF失衡情況</text:p>
          </table:table-cell>
          <table:table-cell table:style-name="表格95.A1" office:value-type="string">
            <text:p text:style-name="P20">新節點位置</text:p>
          </table:table-cell>
          <table:table-cell table:style-name="表格95.A1" office:value-type="string">
            <text:p text:style-name="P20">旋轉方式</text:p>
          </table:table-cell>
        </table:table-row>
        <table:table-row table:style-name="表格95.1">
          <table:table-cell table:style-name="表格95.A2" office:value-type="string">
            <text:p text:style-name="P75">LL 旋轉</text:p>
          </table:table-cell>
          <table:table-cell table:style-name="表格95.B2" office:value-type="string">
            <text:p text:style-name="P82"><text:span text:style-name="T48">BF ≥ 2</text:span>（<text:span text:style-name="T50">左重</text:span>）</text:p>
          </table:table-cell>
          <table:table-cell table:style-name="表格95.C2" office:value-type="string">
            <text:p text:style-name="P85">左子樹的左邊</text:p>
          </table:table-cell>
          <table:table-cell table:style-name="表格95.D2" office:value-type="string">
            <text:p text:style-name="P82">右旋一次</text:p>
          </table:table-cell>
        </table:table-row>
        <table:table-row table:style-name="表格95.1">
          <table:table-cell table:style-name="表格95.A3" office:value-type="string">
            <text:p text:style-name="P75">RR 旋轉</text:p>
          </table:table-cell>
          <table:table-cell table:style-name="表格95.B3" office:value-type="string">
            <text:p text:style-name="P82"><text:span text:style-name="T48">BF ≤ -2</text:span>（<text:span text:style-name="T71">右重</text:span>）</text:p>
          </table:table-cell>
          <table:table-cell table:style-name="表格95.C3" office:value-type="string">
            <text:p text:style-name="P85">右子樹的右邊</text:p>
          </table:table-cell>
          <table:table-cell table:style-name="表格95.D3" office:value-type="string">
            <text:p text:style-name="P82">左旋一次</text:p>
          </table:table-cell>
        </table:table-row>
        <table:table-row table:style-name="表格95.1">
          <table:table-cell table:style-name="表格95.A4" office:value-type="string">
            <text:p text:style-name="P75">LR 旋轉</text:p>
          </table:table-cell>
          <table:table-cell table:style-name="表格95.B4" office:value-type="string">
            <text:p text:style-name="P82"><text:span text:style-name="T72">BF ≥ 2</text:span>（<text:span text:style-name="T74">左重</text:span>）</text:p>
          </table:table-cell>
          <table:table-cell table:style-name="表格95.C4" office:value-type="string">
            <text:p text:style-name="P87">左子樹的右邊</text:p>
          </table:table-cell>
          <table:table-cell table:style-name="表格95.D4" office:value-type="string">
            <text:p text:style-name="P82">先左旋再右旋</text:p>
          </table:table-cell>
        </table:table-row>
        <table:table-row table:style-name="表格95.1">
          <table:table-cell table:style-name="表格95.A5" office:value-type="string">
            <text:p text:style-name="P75">RL 旋轉</text:p>
          </table:table-cell>
          <table:table-cell table:style-name="表格95.B5" office:value-type="string">
            <text:p text:style-name="P82"><text:span text:style-name="T72">BF ≤ -2</text:span>（<text:span text:style-name="T74">右重</text:span>）</text:p>
          </table:table-cell>
          <table:table-cell table:style-name="表格95.C5" office:value-type="string">
            <text:p text:style-name="P87">右子樹的左邊</text:p>
          </table:table-cell>
          <table:table-cell table:style-name="表格95.D5" office:value-type="string">
            <text:p text:style-name="P82">先右旋再左旋</text:p>
          </table:table-cell>
        </table:table-row>
      </table:table>
      <text:p text:style-name="P108"/>
      <text:h text:style-name="P6" text:outline-level="2">AVL-4　AVL Tree 效能保證</text:h>
      <table:table table:name="表格96" table:style-name="表格96">
        <table:table-column table:style-name="表格96.A"/>
        <table:table-row table:style-name="表格96.1">
          <table:table-cell table:style-name="表格96.A1" office:value-type="string">
            <text:p text:style-name="P54">AVL Tree <text:span text:style-name="T27">高度永遠維持在 O(log n)</text:span></text:p>
            <text:p text:style-name="P111"><text:soft-page-break/><text:span text:style-name="T75">搜尋：O(log n) <text:s text:c="2"/>插入：O(log n) <text:s text:c="2"/>刪除：O(log n)</text:span></text:p>
            <text:p text:style-name="P111"/>
            <text:p text:style-name="P54">代價：<text:span text:style-name="T46">每次插入/刪除後都要「往上回頭檢查每個節點的 BF」</text:span>，可能旋轉多次</text:p>
            <text:p text:style-name="P54">→ 如果需要大量插入刪除，Red-Black Tree 可能更適合</text:p>
          </table:table-cell>
        </table:table-row>
      </table:table>
      <text:p text:style-name="P110"/>
      <text:h text:style-name="P25" text:outline-level="1">第三章附：Red-Black Tree 完整介紹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0">Red-Black Tree（紅黑樹）= <text:span text:style-name="T48">每個節點標記「紅色或黑色」</text:span>的<text:span text:style-name="T38">自平衡 BST</text:span></text:p>
            <text:p text:style-name="P100">✔ <text:span text:style-name="T77">是二元樹</text:span>（每節點最多 2 個 child）</text:p>
            <text:p text:style-name="P100">✔ 同時也是 <text:span text:style-name="T27">BST（左 &lt; 根 &lt; 右）</text:span></text:p>
            <text:p text:style-name="P100">✔ <text:span text:style-name="T57">用</text:span><text:span text:style-name="T41">顏色</text:span><text:span text:style-name="T57">規則</text:span><text:span text:style-name="T41">取代</text:span><text:span text:style-name="T57">嚴格的高度差限制</text:span>，效能更穩定</text:p>
          </table:table-cell>
        </table:table-row>
      </table:table>
      <text:p text:style-name="P108"/>
      <text:h text:style-name="P6" text:outline-level="2">RBT-1　五條規則（缺一不可）</text:h>
      <text:p text:style-name="P82">每棵 Red-Black Tree 必須同時滿足以下五條：</text:p>
      <text:p text:style-name="P108"/>
      <table:table table:name="表格98" table:style-name="表格98">
        <table:table-column table:style-name="表格98.A"/>
        <table:table-column table:style-name="表格98.B"/>
        <table:table-row table:style-name="表格98.1">
          <table:table-cell table:style-name="表格98.A1" office:value-type="string">
            <text:p text:style-name="P103">規則1</text:p>
          </table:table-cell>
          <table:table-cell table:style-name="表格98.B1" office:value-type="string">
            <text:p text:style-name="P82">每個節點不是紅色就是黑色（只有兩種顏色）</text:p>
          </table:table-cell>
        </table:table-row>
        <table:table-row table:style-name="表格98.1">
          <table:table-cell table:style-name="表格98.A1" office:value-type="string">
            <text:p text:style-name="P103">規則2</text:p>
          </table:table-cell>
          <table:table-cell table:style-name="表格98.B2" office:value-type="string">
            <text:p text:style-name="P119">根節點（root）一定是黑色</text:p>
          </table:table-cell>
        </table:table-row>
        <table:table-row table:style-name="表格98.1">
          <table:table-cell table:style-name="表格98.A1" office:value-type="string">
            <text:p text:style-name="P103">規則3</text:p>
          </table:table-cell>
          <table:table-cell table:style-name="表格98.B3" office:value-type="string">
            <text:p text:style-name="P121">所有葉節點（NULL 節點）都是黑色</text:p>
          </table:table-cell>
        </table:table-row>
        <table:table-row table:style-name="表格98.1">
          <table:table-cell table:style-name="表格98.A1" office:value-type="string">
            <text:p text:style-name="P103">規則4</text:p>
          </table:table-cell>
          <table:table-cell table:style-name="表格98.B4" office:value-type="string">
            <text:p text:style-name="P82">紅色節點的小孩一定是黑色（<text:span text:style-name="T38">紅色節點不能相鄰</text:span>）</text:p>
          </table:table-cell>
        </table:table-row>
        <table:table-row table:style-name="表格98.1">
          <table:table-cell table:style-name="表格98.A1" office:value-type="string">
            <text:p text:style-name="P103">規則5</text:p>
          </table:table-cell>
          <table:table-cell table:style-name="表格98.B5" office:value-type="string">
            <text:p text:style-name="P82">從<text:span text:style-name="T55">任意節點到</text:span><text:span text:style-name="T87">其</text:span><text:span text:style-name="T31">所有</text:span><text:span text:style-name="T87">葉節點</text:span><text:span text:style-name="T55">的路徑</text:span>，<text:span text:style-name="T77">黑色節點數量相同</text:span>（<text:span text:style-name="T40">黑高度相同</text:span>）</text:p>
          </table:table-cell>
        </table:table-row>
      </table:table>
      <text:p text:style-name="P108"/>
      <text:h text:style-name="P8" text:outline-level="2">RBT-2　視覺化說明（含 NIL 節點完整版）</text:h>
      <text:p text:style-name="P122"/>
      <table:table table:name="表格99" table:style-name="表格99">
        <table:table-column table:style-name="表格99.A"/>
        <table:table-row table:style-name="表格99.1">
          <table:table-cell table:style-name="表格99.A1" office:value-type="string">
            <text:p text:style-name="P43">⚠️ 超重要陷阱：<text:span text:style-name="T31">Red-Black Tree 的「葉節點」和 Binary Tree 的「葉節點」</text:span><text:span text:style-name="T47">不同！</text:span></text:p>
            <text:p text:style-name="P123"/>
            <text:p text:style-name="P120">Binary Tree 的葉節點 = 沒有小孩的實際資料節點（如 3、7、30）</text:p>
            <text:p text:style-name="P92">Red-Black Tree 的葉節點 = NIL（NULL）節點</text:p>
            <text:p text:style-name="P43"><text:s text:c="26"/>↑ 也就是<text:span text:style-name="T79">每個實際節點下面「空的位置」</text:span></text:p>
            <text:p text:style-name="P123"/>
            <text:p text:style-name="P43">規則3<text:span text:style-name="T17">「所有葉節點都是黑色」真正的意思是</text:span>：<text:span text:style-name="T77">所有 NIL 都是黑色</text:span></text:p>
            <text:p text:style-name="P43">不是說「所有沒有小孩的實際資料節點都必須是黑色」！</text:p>
          </table:table-cell>
        </table:table-row>
      </table:table>
      <text:p text:style-name="P122"/>
      <text:p text:style-name="P71">省略版（教科書常見畫法，<text:span text:style-name="T33">NIL 不畫出來</text:span>）</text:p>
      <text:p text:style-name="P84">一般教材<text:span text:style-name="T48">為了簡潔</text:span>，<text:span text:style-name="T77">把 NIL 節點全部省略</text:span>，<text:span text:style-name="T48">只畫實際資料節點</text:span>：</text:p>
      <table:table table:name="表格113" table:style-name="表格113">
        <table:table-column table:style-name="表格113.A"/>
        <table:table-row table:style-name="表格113.1">
          <table:table-cell table:style-name="表格113.A1" office:value-type="string">
            <text:p text:style-name="P31"><text:s text:c="13"/>B:10</text:p>
            <text:p text:style-name="P31"><text:s text:c="12"/>/ <text:s text:c="3"/>\</text:p>
            <text:p text:style-name="P31"><text:s text:c="10"/>R:5 <text:s text:c="3"/>B:20</text:p>
            <text:p text:style-name="P31"><text:s text:c="9"/>/ <text:s/>\ <text:s text:c="5"/>\</text:p>
            <text:p text:style-name="P31"><text:s text:c="7"/>B:3 <text:s/>B:7 <text:s text:c="3"/>R:30</text:p>
            <text:p text:style-name="P124"><text:soft-page-break/></text:p>
            <text:p text:style-name="P31">← <text:span text:style-name="T48">這棵樹看起來 30(R) 是葉子</text:span>，<text:span text:style-name="T88">卻是紅色</text:span>，<text:span text:style-name="T77">初學者會以為違規！</text:span></text:p>
            <text:p text:style-name="P31"><text:s text:c="3"/>但<text:span text:style-name="T27">其實 30 下面還有兩個 NIL(B)</text:span>，所以規則3仍然成立。</text:p>
          </table:table-cell>
        </table:table-row>
      </table:table>
      <text:p text:style-name="P122"/>
      <text:p text:style-name="P71">完整版（含所有 NIL 節點）</text:p>
      <text:p text:style-name="P84"><text:span text:style-name="T27">把所有 NIL 節點畫出來</text:span>，<text:span text:style-name="T16">才是 Red-Black Tree 的正式完整樣貌</text:span>：</text:p>
      <table:table table:name="表格114" table:style-name="表格114">
        <table:table-column table:style-name="表格114.A"/>
        <table:table-row table:style-name="表格114.1">
          <table:table-cell table:style-name="表格114.A1" office:value-type="string">
            <text:p text:style-name="P31"><text:s text:c="20"/>B:10</text:p>
            <text:p text:style-name="P31"><text:s text:c="18"/>/ <text:s text:c="5"/>\</text:p>
            <text:p text:style-name="P31"><text:s text:c="15"/>R:5 <text:s text:c="6"/>B:20</text:p>
            <text:p text:style-name="P31"><text:s text:c="14"/>/ <text:s text:c="2"/>\ <text:s text:c="5"/>/ <text:s text:c="3"/>\</text:p>
            <text:p text:style-name="P31"><text:s text:c="11"/>B:3 <text:s text:c="2"/>B:7 <text:s/><text:span text:style-name="T48">NIL(B)</text:span> <text:s/>R:30</text:p>
            <text:p text:style-name="P31"><text:s text:c="11"/>/ \ <text:s text:c="2"/>/ \ <text:s text:c="9"/>/ <text:s text:c="3"/>\</text:p>
            <text:p text:style-name="P31"><text:s text:c="8"/><text:span text:style-name="T48">NIL</text:span> <text:span text:style-name="T48">NIL</text:span> <text:span text:style-name="T48">NIL</text:span> <text:span text:style-name="T48">NIL</text:span> <text:s text:c="4"/><text:span text:style-name="T48">NIL</text:span> <text:s text:c="2"/><text:span text:style-name="T48">NIL</text:span></text:p>
            <text:p text:style-name="P31"><text:s text:c="8"/><text:span text:style-name="T48">(B)</text:span> <text:span text:style-name="T48">(B)</text:span> <text:span text:style-name="T48">(B)</text:span> <text:span text:style-name="T48">(B)</text:span> <text:s text:c="4"/><text:span text:style-name="T48">(B)</text:span> <text:s text:c="2"/><text:span text:style-name="T48">(B)</text:span></text:p>
            <text:p text:style-name="P124"/>
            <text:p text:style-name="P31">← <text:span text:style-name="T20">所有 NIL 都是黑色</text:span>，規則3 ✔</text:p>
            <text:p text:style-name="P31">← 30(R) 的兩個小孩都是 NIL(B)，規則4 ✔</text:p>
            <text:p text:style-name="P31">← 20(B) 的左小孩是 NIL(B)，右小孩是 30(R)，這也完全合法</text:p>
          </table:table-cell>
        </table:table-row>
      </table:table>
      <text:p text:style-name="P122"/>
      <text:p text:style-name="P71">逐條驗證五大規則</text:p>
      <table:table table:name="表格115" table:style-name="表格115">
        <table:table-column table:style-name="表格115.A"/>
        <table:table-column table:style-name="表格115.B"/>
        <table:table-column table:style-name="表格115.C"/>
        <table:table-row table:style-name="表格115.1">
          <table:table-cell table:style-name="表格115.A1" office:value-type="string">
            <text:p text:style-name="P105">規則</text:p>
          </table:table-cell>
          <table:table-cell table:style-name="表格115.A1" office:value-type="string">
            <text:p text:style-name="P105">結果</text:p>
          </table:table-cell>
          <table:table-cell table:style-name="表格115.A1" office:value-type="string">
            <text:p text:style-name="P105">說明</text:p>
          </table:table-cell>
        </table:table-row>
        <table:table-row table:style-name="表格115.1">
          <table:table-cell table:style-name="表格115.A2" office:value-type="string">
            <text:p text:style-name="P106">規則1</text:p>
          </table:table-cell>
          <table:table-cell table:style-name="表格115.B2" office:value-type="string">
            <text:p text:style-name="P50">✅ 成立</text:p>
          </table:table-cell>
          <table:table-cell table:style-name="表格115.C2" office:value-type="string">
            <text:p text:style-name="P84">每個節點都標了 R 或 B</text:p>
          </table:table-cell>
        </table:table-row>
        <table:table-row table:style-name="表格115.1">
          <table:table-cell table:style-name="表格115.A3" office:value-type="string">
            <text:p text:style-name="P106">規則2</text:p>
          </table:table-cell>
          <table:table-cell table:style-name="表格115.B2" office:value-type="string">
            <text:p text:style-name="P50">✅ 成立</text:p>
          </table:table-cell>
          <table:table-cell table:style-name="表格115.C3" office:value-type="string">
            <text:p text:style-name="P86">root = 10，是黑色（B）</text:p>
          </table:table-cell>
        </table:table-row>
        <table:table-row table:style-name="表格115.1">
          <table:table-cell table:style-name="表格115.A4" office:value-type="string">
            <text:p text:style-name="P106">規則3</text:p>
          </table:table-cell>
          <table:table-cell table:style-name="表格115.B2" office:value-type="string">
            <text:p text:style-name="P50">✅ 成立</text:p>
          </table:table-cell>
          <table:table-cell table:style-name="表格115.C4" office:value-type="string">
            <text:p text:style-name="P84"><text:span text:style-name="T48">所有 NIL 節點都是黑色</text:span>（圖中省略但存在）</text:p>
          </table:table-cell>
        </table:table-row>
        <table:table-row table:style-name="表格115.1">
          <table:table-cell table:style-name="表格115.A5" office:value-type="string">
            <text:p text:style-name="P106">規則4</text:p>
          </table:table-cell>
          <table:table-cell table:style-name="表格115.B2" office:value-type="string">
            <text:p text:style-name="P50">✅ 成立</text:p>
          </table:table-cell>
          <table:table-cell table:style-name="表格115.C5" office:value-type="string">
            <text:p text:style-name="P84">R:5 的小孩是 B:3 和 B:7（黑）；<text:span text:style-name="T72">R:30 的小孩是 NIL(B) 和 NIL(B)（黑）</text:span></text:p>
          </table:table-cell>
        </table:table-row>
        <table:table-row table:style-name="表格115.1">
          <table:table-cell table:style-name="表格115.A6" office:value-type="string">
            <text:p text:style-name="P106">規則5</text:p>
          </table:table-cell>
          <table:table-cell table:style-name="表格115.B2" office:value-type="string">
            <text:p text:style-name="P50">✅ 成立</text:p>
          </table:table-cell>
          <table:table-cell table:style-name="表格115.C6" office:value-type="string">
            <text:p text:style-name="P84">見下方黑高計算</text:p>
          </table:table-cell>
        </table:table-row>
      </table:table>
      <text:p text:style-name="P122"/>
      <text:p text:style-name="P71">規則5 詳細計算（黑高度一致性）</text:p>
      <text:p text:style-name="P84">每條從 root 到 NIL 的路徑，計算黑色節點數（<text:span text:style-name="T48">含或不含 NIL 均可</text:span>，只要一致即可）：</text:p>
      <table:table table:name="表格116" table:style-name="表格116">
        <table:table-column table:style-name="表格116.A"/>
        <table:table-row table:style-name="表格116.1">
          <table:table-cell table:style-name="表格116.A1" office:value-type="string">
            <text:p text:style-name="P31">【不算 NIL 的版本（教材常用）】</text:p>
            <text:p text:style-name="P31">路徑1：10(B) → 5(R) → 3(B) → NIL <text:s text:c="4"/>黑節點：10、3 <text:s text:c="4"/>= 2 個</text:p>
            <text:p text:style-name="P31">路徑2：10(B) → 5(R) → 7(B) → NIL <text:s text:c="4"/>黑節點：10、7 <text:s text:c="4"/>= 2 個</text:p>
            <text:p text:style-name="P31">路徑3：10(B) → 20(B) → NIL(左) <text:s text:c="7"/>黑節點：10、20 <text:s text:c="3"/>= 2 個</text:p>
            <text:p text:style-name="P31">路徑4：10(B) → 20(B) → 30(R) → NIL <text:s text:c="2"/>黑節點：10、20 <text:s text:c="3"/>= 2 個</text:p>
            <text:p text:style-name="P31"><text:s text:c="39"/>全部都是 2，規則5 ✔</text:p>
            <text:p text:style-name="P124"/>
            <text:p text:style-name="P31">【算 NIL 的版本（教科書正式版）】</text:p>
            <text:p text:style-name="P124"><text:soft-page-break/><text:span text:style-name="T44">路徑1：10(B) → 5(R) → 3(B) → NIL(B) <text:s/>黑節點：10、3、NIL = 3 個</text:span></text:p>
            <text:p text:style-name="P31">路徑2：10(B) → 5(R) → 7(B) → NIL(B) <text:s/>黑節點：10、7、NIL = 3 個</text:p>
            <text:p text:style-name="P31">路徑3：10(B) → 20(B) → NIL(B) <text:s text:c="8"/>黑節點：10、20、NIL= 3 個</text:p>
            <text:p text:style-name="P31">路徑4：10(B) → 20(B) → 30(R) → NIL(B)黑節點：10、20、NIL= 3 個</text:p>
            <text:p text:style-name="P31"><text:s text:c="39"/>全部都是 3，規則5 ✔</text:p>
          </table:table-cell>
        </table:table-row>
      </table:table>
      <text:p text:style-name="P122"/>
      <table:table table:name="表格117" table:style-name="表格117">
        <table:table-column table:style-name="表格117.A"/>
        <table:table-row table:style-name="表格117.1">
          <table:table-cell table:style-name="表格117.A1" office:value-type="string">
            <text:p text:style-name="P102">📌 考試應對方式：</text:p>
            <text:p text:style-name="P123"/>
            <text:p text:style-name="P102">看到「葉節點都是黑色」→ 腦中自動翻譯成「所有 NIL 都是黑色」</text:p>
            <text:p text:style-name="P123"/>
            <text:p text:style-name="P107">看到 30(R) 是「葉子」卻是紅色 → 不要以為違規！</text:p>
            <text:p text:style-name="P102"><text:s text:c="2"/><text:span text:style-name="T17">30(R) 的正式葉節點是它下面的兩個 NIL(B)</text:span>，規則3 仍然成立。</text:p>
            <text:p text:style-name="P123"/>
            <text:p text:style-name="P102">計算黑高時：含 NIL 或不含 NIL 都可以，只要整棵樹算法一致即可。</text:p>
          </table:table-cell>
        </table:table-row>
      </table:table>
      <text:p text:style-name="P122"/>
      <text:h text:style-name="P7" text:outline-level="2">RBT-3　為什麼「顏色」能保持平衡？</text:h>
      <text:p text:style-name="P83"><text:span text:style-name="T38">規則 4 + 規則 5 合起來保證了高度的上限</text:span>：</text:p>
      <table:table table:name="表格100" table:style-name="表格100">
        <table:table-column table:style-name="表格100.A"/>
        <table:table-row table:style-name="表格100.1">
          <table:table-cell table:style-name="表格100.A1" office:value-type="string">
            <text:p text:style-name="P101">因為紅色節點不能連續出現（規則4），</text:p>
            <text:p text:style-name="P101">最長的路徑（紅黑交替）最多是最短路徑（全黑）的 2 倍。</text:p>
            <text:p text:style-name="P112"/>
            <text:p text:style-name="P101">因此 Red-Black Tree 的高度保證在 2 × log₂(n+1) 以內</text:p>
            <text:p text:style-name="P101">→ 搜尋、插入、刪除仍然是 O(log n)</text:p>
          </table:table-cell>
        </table:table-row>
      </table:table>
      <text:p text:style-name="P109"/>
      <text:h text:style-name="P6" text:outline-level="2">RBT-4　插入後如何修復？</text:h>
      <text:p text:style-name="P132">為什麼新節點一定塗紅色？</text:p>
      <table:table table:name="表格101" table:style-name="表格101">
        <table:table-column table:style-name="表格101.A" table:number-columns-repeated="2"/>
        <table:table-row table:style-name="表格101.1">
          <table:table-cell table:style-name="表格101.A1" office:value-type="string">
            <text:p text:style-name="P134">如果塗黑色</text:p>
            <text:p text:style-name="P154">一定增加某條路徑的黑高</text:p>
            <text:p text:style-name="P135">違反規則5（黑高一致）</text:p>
            <text:p text:style-name="P135">→ 黑高不一致極難修復</text:p>
          </table:table-cell>
          <table:table-cell table:style-name="表格101.B1" office:value-type="string">
            <text:p text:style-name="P142">如果塗紅色 ✔</text:p>
            <text:p text:style-name="P153">黑高完全不變</text:p>
            <text:p text:style-name="P135"><text:span text:style-name="T49">只可能</text:span><text:span text:style-name="T39">違反規則4（紅紅相鄰）</text:span></text:p>
            <text:p text:style-name="P135">→ 只要<text:span text:style-name="T80">看爸爸是不是紅色即可</text:span></text:p>
          </table:table-cell>
        </table:table-row>
      </table:table>
      <text:p text:style-name="P125"/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45">因此插入後唯一可能的違規：自己（紅）的爸爸也是紅色</text:p>
            <text:p text:style-name="P126"/>
            <text:p text:style-name="P145">三個關鍵角色：</text:p>
            <text:p text:style-name="P145"><text:s/><text:span text:style-name="T49"><text:s/>X = 新插入節點</text:span>（<text:span text:style-name="T89">紅色</text:span>，<text:span text:style-name="T6">違規的那個</text:span>）</text:p>
            <text:p text:style-name="P145"><text:s/><text:span text:style-name="T51"><text:s/>P = X 的父節點</text:span>（<text:span text:style-name="T89">紅色</text:span><text:span text:style-name="T90">­</text:span> <text:span text:style-name="T4">→ 引發違規</text:span>）</text:p>
            <text:p text:style-name="P145"><text:s text:c="2"/>G = X 的祖父節點（一定是黑色，因為插入前整棵樹合法）</text:p>
            <text:p text:style-name="P145"><text:s text:c="2"/><text:span text:style-name="T49">U = X 的叔叔節點</text:span>（<text:span text:style-name="T28">P 的兄弟，可紅可黑</text:span>）</text:p>
          </table:table-cell>
        </table:table-row>
      </table:table>
      <text:p text:style-name="P125"/>
      <table:table table:name="表格119" table:style-name="表格119">
        <table:table-column table:style-name="表格119.A"/>
        <text:soft-page-break/>
        <table:table-row table:style-name="表格119.1">
          <table:table-cell table:style-name="表格119.A1" office:value-type="string">
            <text:p text:style-name="P148"><text:s text:c="8"/>G(B) <text:s/>← 祖父，黑色</text:p>
            <text:p text:style-name="P148"><text:s text:c="7"/>/ <text:s text:c="3"/>\</text:p>
            <text:p text:style-name="P148"><text:s text:c="5"/>P(R) <text:s text:c="2"/>U(?) <text:s/>← 叔叔，顏色決定修復方式</text:p>
            <text:p text:style-name="P148"><text:s text:c="4"/>/</text:p>
            <text:p text:style-name="P148"><text:s text:c="2"/>X(R) <text:s/>← 新節點，和 P 都是紅色，違反規則4！</text:p>
          </table:table-cell>
        </table:table-row>
      </table:table>
      <text:p text:style-name="P125"/>
      <text:p text:style-name="P128"/>
      <text:p text:style-name="P133">Case 1：<text:span text:style-name="T51">叔叔 U 是紅色</text:span> → <text:span text:style-name="T49">只改顏色</text:span>，<text:span text:style-name="T34">不旋轉</text:span></text:p>
      <table:table table:name="表格120" table:style-name="表格120">
        <table:table-column table:style-name="表格120.A"/>
        <table:table-row table:style-name="表格120.1">
          <table:table-cell table:style-name="表格120.A1" office:value-type="string">
            <text:p text:style-name="P145">操作：把 P 和 U 都塗黑，把 G 塗紅，然後往上繼續檢查 G</text:p>
          </table:table-cell>
        </table:table-row>
        <table:table-row table:style-name="表格120.1">
          <table:table-cell table:style-name="表格120.A2" office:value-type="string">
            <text:p text:style-name="P148">修復前： <text:s text:c="23"/>修復後：</text:p>
            <text:p text:style-name="P148"><text:s text:c="6"/>G(B) <text:s text:c="27"/><text:span text:style-name="T49">G(R)</text:span> ← <text:span text:style-name="T70">G 塗紅</text:span>，可能往上繼續違規</text:p>
            <text:p text:style-name="P148"><text:s text:c="5"/>/ <text:s text:c="3"/>\ <text:s text:c="25"/>/ <text:s text:c="3"/>\</text:p>
            <text:p text:style-name="P148"><text:s text:c="3"/>P(R) <text:s text:c="2"/><text:span text:style-name="T56">U(R)</text:span> <text:s text:c="9"/>→ <text:s text:c="9"/><text:span text:style-name="T49">P(B) <text:s/>U(B)</text:span> ← <text:span text:style-name="T51">兩個都塗黑</text:span></text:p>
            <text:p text:style-name="P148"><text:s text:c="3"/>/ <text:s text:c="30"/>/</text:p>
            <text:p text:style-name="P148"><text:s text:c="2"/>X(R) <text:s text:c="27"/>X(R)</text:p>
          </table:table-cell>
        </table:table-row>
      </table:table>
      <text:p text:style-name="P135">為什麼 G 要塗紅？因為 <text:span text:style-name="T83">P 和 U 都變黑，從 G 往下兩條路各多了一個黑節點</text:span>，</text:p>
      <text:p text:style-name="P135"><text:span text:style-name="T23">必須把 G 塗紅來補償黑高</text:span>，<text:span text:style-name="T60">讓規則5維持不變</text:span>。但 G 變紅後可能和 G 的父節點</text:p>
      <text:p text:style-name="P135">又違反規則4，所以要往上繼續檢查，直到 root 或不再違規為止。</text:p>
      <text:p text:style-name="P125"/>
      <text:p text:style-name="P132">Case 2：<text:span text:style-name="T51">叔叔 U 是黑色</text:span>，<text:span text:style-name="T4">且 X 是 P 的右子</text:span> → <text:span text:style-name="T34">先旋轉轉成 Case 3</text:span></text:p>
      <table:table table:name="表格121" table:style-name="表格121">
        <table:table-column table:style-name="表格121.A"/>
        <table:table-row table:style-name="表格121.1">
          <table:table-cell table:style-name="表格121.A1" office:value-type="string">
            <text:p text:style-name="P145">操作：對 P 做左旋，讓 X 和 P 互換位置，變成 Case 3 格局，再繼續</text:p>
          </table:table-cell>
        </table:table-row>
        <table:table-row table:style-name="表格121.1">
          <table:table-cell table:style-name="表格121.A2" office:value-type="string">
            <text:p text:style-name="P148">修復前： <text:s text:c="23"/><text:span text:style-name="T39">對 P 左旋後</text:span>（變 Case 3）：</text:p>
            <text:p text:style-name="P148"><text:s text:c="6"/>G(B) <text:s text:c="27"/>G(B)</text:p>
            <text:p text:style-name="P148"><text:s text:c="5"/>/ <text:s text:c="3"/>\ <text:s text:c="25"/>/ <text:s text:c="3"/>\</text:p>
            <text:p text:style-name="P148"><text:s text:c="3"/>P(R) <text:s text:c="2"/><text:span text:style-name="T56">U(B)</text:span> <text:s text:c="9"/>→ <text:s text:c="9"/>X(R) <text:s text:c="2"/><text:span text:style-name="T49">U(B)</text:span></text:p>
            <text:p text:style-name="P148"><text:s text:c="6"/>\ <text:s text:c="27"/>/</text:p>
            <text:p text:style-name="P148"><text:s text:c="6"/>X(R) ← <text:span text:style-name="T70">X 在右邊</text:span> <text:s text:c="11"/><text:span text:style-name="T28">P(R)</text:span> ← <text:span text:style-name="T70">P 跑下去了</text:span></text:p>
            <text:p text:style-name="P127"/>
            <text:p text:style-name="P149">← 旋轉後：P 在 X 的左邊，符合 Case 3 格局，接著用 Case 3 修復</text:p>
          </table:table-cell>
        </table:table-row>
      </table:table>
      <text:p text:style-name="P125"/>
      <text:p text:style-name="P132">Case 3：<text:span text:style-name="T51">叔叔 U 是黑色</text:span>，<text:span text:style-name="T73">且 X 是 P 的左子</text:span> → <text:span text:style-name="T22">旋轉 + 改色，完成！</text:span></text:p>
      <table:table table:name="表格122" table:style-name="表格122">
        <table:table-column table:style-name="表格122.A"/>
        <table:table-row table:style-name="表格122.1">
          <table:table-cell table:style-name="表格122.A1" office:value-type="string">
            <text:p text:style-name="P144">操作：對 G 做右旋，然後交換 P 和 G 的顏色。修復完成，不需繼續往上</text:p>
          </table:table-cell>
        </table:table-row>
        <table:table-row table:style-name="表格122.1">
          <table:table-cell table:style-name="表格122.A2" office:value-type="string">
            <text:p text:style-name="P148">修復前： <text:s text:c="23"/><text:span text:style-name="T39">對 G 右旋</text:span> + <text:span text:style-name="T28">交換 P/G 顏色</text:span>：</text:p>
            <text:p text:style-name="P148"><text:s text:c="6"/>G(B) <text:s text:c="27"/><text:span text:style-name="T58">P(B)</text:span> ← <text:span text:style-name="T18">原本紅色</text:span>，現在黑色（當新根）</text:p>
            <text:p text:style-name="P148"><text:s text:c="5"/>/ <text:s text:c="3"/>\ <text:s text:c="25"/>/ <text:s text:c="3"/>\</text:p>
            <text:p text:style-name="P148"><text:s text:c="3"/>P(R) <text:s text:c="2"/><text:span text:style-name="T56">U(B)</text:span> <text:s text:c="9"/>→ <text:s text:c="9"/>X(R) <text:s/><text:span text:style-name="T58">G(R)</text:span> ← <text:span text:style-name="T9">原本黑色</text:span>，現在紅色</text:p>
            <text:p text:style-name="P148"><text:s text:c="3"/>/ <text:s text:c="40"/>\</text:p>
            <text:p text:style-name="P148"><text:s text:c="2"/>X(R) <text:s text:c="38"/>U(B)</text:p>
            <text:p text:style-name="P127"/>
            <text:p text:style-name="P148">← P 變黑頂替 G 的位置，黑高不變；G 變紅但右子是 U(B)，不違反規則4</text:p>
            <text:p text:style-name="P148">← 整個子樹修復完成，不需要繼續往上檢查！</text:p>
          </table:table-cell>
        </table:table-row>
      </table:table>
      <text:p text:style-name="P125"/>
      <text:p text:style-name="P132">三個 Case 總整理</text:p>
      <table:table table:name="表格123" table:style-name="表格123">
        <table:table-column table:style-name="表格123.A"/>
        <table:table-column table:style-name="表格123.B"/>
        <table:table-column table:style-name="表格123.C"/>
        <table:table-column table:style-name="表格123.D"/>
        <table:table-column table:style-name="表格123.E"/>
        <table:table-row table:style-name="表格123.1">
          <table:table-cell table:style-name="表格123.A1" office:value-type="string">
            <text:p text:style-name="P146">Case</text:p>
          </table:table-cell>
          <table:table-cell table:style-name="表格123.A1" office:value-type="string">
            <text:p text:style-name="P146">叔叔顏色</text:p>
          </table:table-cell>
          <table:table-cell table:style-name="表格123.A1" office:value-type="string">
            <text:p text:style-name="P146">X 的位置</text:p>
          </table:table-cell>
          <table:table-cell table:style-name="表格123.A1" office:value-type="string">
            <text:p text:style-name="P146">操作</text:p>
          </table:table-cell>
          <table:table-cell table:style-name="表格123.A1" office:value-type="string">
            <text:p text:style-name="P146">繼續往上？</text:p>
          </table:table-cell>
        </table:table-row>
        <table:table-row table:style-name="表格123.1">
          <table:table-cell table:style-name="表格123.A2" office:value-type="string">
            <text:p text:style-name="P147">Case 1</text:p>
          </table:table-cell>
          <table:table-cell table:style-name="表格123.B2" office:value-type="string">
            <text:p text:style-name="P155">紅</text:p>
          </table:table-cell>
          <table:table-cell table:style-name="表格123.C2" office:value-type="string">
            <text:p text:style-name="P135">左或右皆可</text:p>
          </table:table-cell>
          <table:table-cell table:style-name="表格123.D2" office:value-type="string">
            <text:p text:style-name="P135">P、U 塗黑；G 塗紅</text:p>
          </table:table-cell>
          <table:table-cell table:style-name="表格123.E2" office:value-type="string">
            <text:p text:style-name="P150">✅ 要繼續</text:p>
          </table:table-cell>
        </table:table-row>
        <text:soft-page-break/>
        <table:table-row table:style-name="表格123.1">
          <table:table-cell table:style-name="表格123.A3" office:value-type="string">
            <text:p text:style-name="P147">Case 2</text:p>
          </table:table-cell>
          <table:table-cell table:style-name="表格123.B3" office:value-type="string">
            <text:p text:style-name="P156">黑</text:p>
          </table:table-cell>
          <table:table-cell table:style-name="表格123.C3" office:value-type="string">
            <text:p text:style-name="P140">P 的右子</text:p>
          </table:table-cell>
          <table:table-cell table:style-name="表格123.D3" office:value-type="string">
            <text:p text:style-name="P135">對 P 左旋 → <text:span text:style-name="T39">變 Case 3</text:span></text:p>
          </table:table-cell>
          <table:table-cell table:style-name="表格123.A1" office:value-type="string">
            <text:p text:style-name="P147">接著 Case 3</text:p>
          </table:table-cell>
        </table:table-row>
        <table:table-row table:style-name="表格123.1">
          <table:table-cell table:style-name="表格123.A4" office:value-type="string">
            <text:p text:style-name="P147">Case 3</text:p>
          </table:table-cell>
          <table:table-cell table:style-name="表格123.B4" office:value-type="string">
            <text:p text:style-name="P156">黑</text:p>
          </table:table-cell>
          <table:table-cell table:style-name="表格123.C4" office:value-type="string">
            <text:p text:style-name="P141">P 的左子</text:p>
          </table:table-cell>
          <table:table-cell table:style-name="表格123.D4" office:value-type="string">
            <text:p text:style-name="P135">對 G 右旋 + <text:span text:style-name="T28">交換 P/G 顏色</text:span></text:p>
          </table:table-cell>
          <table:table-cell table:style-name="表格123.E4" office:value-type="string">
            <text:p text:style-name="P143">❌ 完成！</text:p>
          </table:table-cell>
        </table:table-row>
      </table:table>
      <text:p text:style-name="P125"/>
      <table:table table:name="表格124" table:style-name="表格124">
        <table:table-column table:style-name="表格124.A"/>
        <table:table-row table:style-name="表格124.1">
          <table:table-cell table:style-name="表格124.A1" office:value-type="string">
            <text:p text:style-name="P151">⚠️ <text:span text:style-name="T49">以上三個 Case 的前提</text:span>：<text:span text:style-name="T18">P 是 G 的左子節點</text:span></text:p>
            <text:p text:style-name="P151"><text:span text:style-name="T78">若 P 是 G 的右子節點 → 做法完全對稱</text:span>（左右鏡像互換）：</text:p>
            <text:p text:style-name="P152"><text:s text:c="2"/>Case 2 變成：<text:span text:style-name="T4">X 在 P 的右子</text:span> → <text:span text:style-name="T9">對 P 左旋</text:span></text:p>
            <text:p text:style-name="P152"><text:s text:c="2"/>Case 3 變成：<text:span text:style-name="T98">X 在 P 的左子</text:span> → <text:span text:style-name="T9">對 G 右旋</text:span> + <text:span text:style-name="T28">交換顏色</text:span></text:p>
            <text:p text:style-name="P126"/>
            <text:p text:style-name="P151">最後一步：無論哪個 Case，修復結束後強制把 root 塗成黑色（規則2）。</text:p>
          </table:table-cell>
        </table:table-row>
      </table:table>
      <text:p text:style-name="P125"/>
      <text:h text:style-name="P6" text:outline-level="2">RBT-5　Red-Black Tree vs AVL Tree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row table:style-name="表格102.1">
          <table:table-cell table:style-name="表格102.A1" office:value-type="string">
            <text:p text:style-name="P20">比較項目</text:p>
          </table:table-cell>
          <table:table-cell table:style-name="表格102.B1" office:value-type="string">
            <text:p text:style-name="P76">AVL Tree</text:p>
          </table:table-cell>
          <table:table-cell table:style-name="表格102.C1" office:value-type="string">
            <text:p text:style-name="P104">Red-Black Tree</text:p>
          </table:table-cell>
        </table:table-row>
        <table:table-row table:style-name="表格102.1">
          <table:table-cell table:style-name="表格102.A2" office:value-type="string">
            <text:p text:style-name="P20">是否為二元樹</text:p>
          </table:table-cell>
          <table:table-cell table:style-name="表格102.B2" office:value-type="string">
            <text:p text:style-name="P82">✔ 是</text:p>
          </table:table-cell>
          <table:table-cell table:style-name="表格102.C2" office:value-type="string">
            <text:p text:style-name="P82">✔ 是</text:p>
          </table:table-cell>
        </table:table-row>
        <table:table-row table:style-name="表格102.1">
          <table:table-cell table:style-name="表格102.A2" office:value-type="string">
            <text:p text:style-name="P20">是否為 BST</text:p>
          </table:table-cell>
          <table:table-cell table:style-name="表格102.B3" office:value-type="string">
            <text:p text:style-name="P82">✔ 是</text:p>
          </table:table-cell>
          <table:table-cell table:style-name="表格102.C3" office:value-type="string">
            <text:p text:style-name="P82">✔ 是</text:p>
          </table:table-cell>
        </table:table-row>
        <table:table-row table:style-name="表格102.1">
          <table:table-cell table:style-name="表格102.A2" office:value-type="string">
            <text:p text:style-name="P20">平衡機制</text:p>
          </table:table-cell>
          <table:table-cell table:style-name="表格102.B4" office:value-type="string">
            <text:p text:style-name="P82">嚴格高度差 ≤ 1</text:p>
          </table:table-cell>
          <table:table-cell table:style-name="表格102.C4" office:value-type="string">
            <text:p text:style-name="P82">顏色規則</text:p>
          </table:table-cell>
        </table:table-row>
        <table:table-row table:style-name="表格102.1">
          <table:table-cell table:style-name="表格102.A2" office:value-type="string">
            <text:p text:style-name="P20">平衡程度</text:p>
          </table:table-cell>
          <table:table-cell table:style-name="表格102.B5" office:value-type="string">
            <text:p text:style-name="P82">更嚴格（更矮）</text:p>
          </table:table-cell>
          <table:table-cell table:style-name="表格102.C5" office:value-type="string">
            <text:p text:style-name="P82">較寬鬆（可略高）</text:p>
          </table:table-cell>
        </table:table-row>
        <table:table-row table:style-name="表格102.1">
          <table:table-cell table:style-name="表格102.A2" office:value-type="string">
            <text:p text:style-name="P20">搜尋速度</text:p>
          </table:table-cell>
          <table:table-cell table:style-name="表格102.B6" office:value-type="string">
            <text:p text:style-name="P138">略快</text:p>
          </table:table-cell>
          <table:table-cell table:style-name="表格102.C6" office:value-type="string">
            <text:p text:style-name="P139">略慢</text:p>
          </table:table-cell>
        </table:table-row>
        <table:table-row table:style-name="表格102.1">
          <table:table-cell table:style-name="表格102.A2" office:value-type="string">
            <text:p text:style-name="P20">插入/刪除速度</text:p>
          </table:table-cell>
          <table:table-cell table:style-name="表格102.B7" office:value-type="string">
            <text:p text:style-name="P82">較慢（旋轉多）</text:p>
          </table:table-cell>
          <table:table-cell table:style-name="表格102.C7" office:value-type="string">
            <text:p text:style-name="P82">較快（旋轉少）</text:p>
          </table:table-cell>
        </table:table-row>
        <table:table-row table:style-name="表格102.1">
          <table:table-cell table:style-name="表格102.A2" office:value-type="string">
            <text:p text:style-name="P20">適合場景</text:p>
          </table:table-cell>
          <table:table-cell table:style-name="表格102.B8" office:value-type="string">
            <text:p text:style-name="P136">讀多寫少</text:p>
          </table:table-cell>
          <table:table-cell table:style-name="表格102.C8" office:value-type="string">
            <text:p text:style-name="P137">讀寫頻繁</text:p>
          </table:table-cell>
        </table:table-row>
        <table:table-row table:style-name="表格102.1">
          <table:table-cell table:style-name="表格102.A2" office:value-type="string">
            <text:p text:style-name="P20">實際應用</text:p>
          </table:table-cell>
          <table:table-cell table:style-name="表格102.B9" office:value-type="string">
            <text:p text:style-name="P82">少數特殊場景</text:p>
          </table:table-cell>
          <table:table-cell table:style-name="表格102.C9" office:value-type="string">
            <text:p text:style-name="P82">C++ map、Java TreeMap、Linux 排程</text:p>
          </table:table-cell>
        </table:table-row>
      </table:table>
      <text:p text:style-name="P110"/>
      <text:h text:style-name="P25" text:outline-level="1">第三章附：B-Tree 完整介紹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42">⚠️ <text:span text:style-name="T28">B-Tree 不是二元樹！</text:span></text:p>
            <text:p text:style-name="P42">Binary Tree = 每個節點最多 2 個子節點</text:p>
            <text:p text:style-name="P42"><text:span text:style-name="T70">B-Tree </text:span>= <text:span text:style-name="T49">每個節點</text:span>可以<text:span text:style-name="T32">有很多個 key </text:span>和<text:span text:style-name="T102">很多個子節點</text:span>（階數決定上限）</text:p>
            <text:p text:style-name="P42">B-Tree 是「<text:span text:style-name="T104">多元搜尋樹（M-ary Search Tree）</text:span>」</text:p>
          </table:table-cell>
        </table:table-row>
      </table:table>
      <text:p text:style-name="P108"/>
      <text:h text:style-name="P6" text:outline-level="2">BT-1　為什麼要發明 B-Tree？</text:h>
      <text:p text:style-name="P82">回憶 BST 和 AVL Tree 的問題：它們都假設資料在記憶體（RAM）裡。</text:p>
      <text:p text:style-name="P82">但資料庫的資料放在硬碟（Disk）上，每次讀一個節點就是一次磁碟 I/O，非常慢：</text:p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42">RAM <text:s/>讀取速度：奈秒（ns）級，約 100 ns</text:p>
            <text:p text:style-name="P42">磁碟 讀取速度：毫秒（ms）級，約 5~10 ms</text:p>
            <text:p text:style-name="P111"/>
            <text:p text:style-name="P42">磁碟比 RAM 慢約 100,000 倍！</text:p>
            <text:p text:style-name="P111"/>
            <text:p text:style-name="P42">BST 有 100 萬筆資料 → 需要 log₂(1,000,000) ≈ 20 次磁碟讀取</text:p>
            <text:p text:style-name="P42">B-Tree（階數500）→ 只需 log₅₀₀(1,000,000) ≈ 4 次磁碟讀取</text:p>
            <text:p text:style-name="P42">→ B-Tree 讓磁碟讀取次數從 20 降到 4，快了 5 倍！</text:p>
          </table:table-cell>
        </table:table-row>
      </table:table>
      <text:p text:style-name="P108"/>
      <text:h text:style-name="P6" text:outline-level="2">BT-2　B-Tree 的結構</text:h>
      <text:p text:style-name="P82">B-Tree 的核心概念：把很多 key 塞進同一個節點，一次磁碟讀取就能比較很多值。</text:p>
      <table:table table:name="表格105" table:style-name="表格105">
        <table:table-column table:style-name="表格105.A"/>
        <table:table-row table:style-name="表格105.1">
          <table:table-cell table:style-name="表格105.A1" office:value-type="string">
            <text:p text:style-name="P16">B-Tree 的「階數（Order）m」定義了節點的上限：</text:p>
            <text:p text:style-name="P16"><text:s text:c="2"/>每個節點最多 m 個子節點，最多 m-1 個 key</text:p>
            <text:p text:style-name="P16"><text:s text:c="2"/>每個非 root 節點最少 ⌈m/2⌉ 個子節點</text:p>
          </table:table-cell>
        </table:table-row>
      </table:table>
      <text:p text:style-name="P108"/>
      <text:p text:style-name="P82">以「3 階 B-Tree」為例（每個節點最多 2 個 key、3 個子節點）：</text:p>
      <table:table table:name="表格106" table:style-name="表格106">
        <table:table-column table:style-name="表格106.A"/>
        <table:table-row table:style-name="表格106.1">
          <table:table-cell table:style-name="表格106.A1" office:value-type="string">
            <text:p text:style-name="P30"><text:s text:c="17"/>[20 | 50] <text:s text:c="15"/>← root，有 2 個 key</text:p>
            <text:p text:style-name="P30"><text:s text:c="16"/>/ <text:s text:c="3"/>| <text:s text:c="3"/>\</text:p>
            <text:p text:style-name="P30"><text:s text:c="11"/>[10] <text:s text:c="2"/>[30|40] <text:s text:c="2"/>[60|70|80]</text:p>
            <text:p text:style-name="P30"><text:s text:c="11"/>↑ <text:s text:c="8"/>↑ <text:s text:c="10"/>↑</text:p>
            <text:p text:style-name="P30"><text:s text:c="9"/>子節點1 <text:s/>子節點2 <text:s text:c="4"/>子節點3</text:p>
            <text:p text:style-name="P113"/>
            <text:p text:style-name="P30">規則（同 BST 概念，但擴展到多個 key）：</text:p>
            <text:p text:style-name="P30"><text:s text:c="2"/>子節點1 的值 &lt; 20</text:p>
            <text:p text:style-name="P30"><text:s text:c="2"/>20 &lt; 子節點2 的值 &lt; 50</text:p>
            <text:p text:style-name="P30"><text:s text:c="2"/>子節點3 的值 &gt; 50</text:p>
          </table:table-cell>
        </table:table-row>
      </table:table>
      <text:p text:style-name="P108"/>
      <text:h text:style-name="P114" text:outline-level="2"><text:soft-page-break/><text:span text:style-name="T76">BT-3　B-Tree 的性質</text:span></text:h>
      <table:table table:name="表格107" table:style-name="表格107">
        <table:table-column table:style-name="表格107.A"/>
        <table:table-column table:style-name="表格107.B"/>
        <table:table-row table:style-name="表格107.1">
          <table:table-cell table:style-name="表格107.A1" office:value-type="string">
            <text:p text:style-name="P76">性質</text:p>
          </table:table-cell>
          <table:table-cell table:style-name="表格107.A1" office:value-type="string">
            <text:p text:style-name="P76">說明</text:p>
          </table:table-cell>
        </table:table-row>
        <table:table-row table:style-name="表格107.1">
          <table:table-cell table:style-name="表格107.A2" office:value-type="string">
            <text:p text:style-name="P76">所有葉節點在同一層</text:p>
          </table:table-cell>
          <table:table-cell table:style-name="表格107.B2" office:value-type="string">
            <text:p text:style-name="P82">樹高度完全平衡，不會歪斜</text:p>
          </table:table-cell>
        </table:table-row>
        <table:table-row table:style-name="表格107.1">
          <table:table-cell table:style-name="表格107.A3" office:value-type="string">
            <text:p text:style-name="P76">每次搜尋保證 O(log n)</text:p>
          </table:table-cell>
          <table:table-cell table:style-name="表格107.B3" office:value-type="string">
            <text:p text:style-name="P82">雖然底數是 m，但磁碟 I/O 大幅減少</text:p>
          </table:table-cell>
        </table:table-row>
        <table:table-row table:style-name="表格107.1">
          <table:table-cell table:style-name="表格107.A4" office:value-type="string">
            <text:p text:style-name="P76">節點飽滿時自動分裂</text:p>
          </table:table-cell>
          <table:table-cell table:style-name="表格107.B4" office:value-type="string">
            <text:p text:style-name="P82">插入時若節點滿了，中間 key 往上移，左右分成兩個節點</text:p>
          </table:table-cell>
        </table:table-row>
        <table:table-row table:style-name="表格107.1">
          <table:table-cell table:style-name="表格107.A5" office:value-type="string">
            <text:p text:style-name="P76">自動合併</text:p>
          </table:table-cell>
          <table:table-cell table:style-name="表格107.B5" office:value-type="string">
            <text:p text:style-name="P82">刪除後若節點太少，與兄弟合併或借 key</text:p>
          </table:table-cell>
        </table:table-row>
      </table:table>
      <text:p text:style-name="P108"/>
      <text:h text:style-name="P6" text:outline-level="2">BT-4　B+Tree（資料庫最常用）</text:h>
      <text:p text:style-name="P82">B+Tree 是 B-Tree 的變形，幾乎所有資料庫索引用的都是 B+Tree：</text:p>
      <table:table table:name="表格108" table:style-name="表格108">
        <table:table-column table:style-name="表格108.A" table:number-columns-repeated="2"/>
        <table:table-row table:style-name="表格108.1">
          <table:table-cell table:style-name="表格108.A1" office:value-type="string">
            <text:p text:style-name="P21">B-Tree</text:p>
            <text:list text:style-name="WWNum2">
              <text:list-item text:start-value="1">
                <text:p text:style-name="P129">所有節點都存 key 和 data</text:p>
              </text:list-item>
              <text:list-item>
                <text:p text:style-name="P129">搜尋可能在中間節點就結束</text:p>
              </text:list-item>
              <text:list-item>
                <text:p text:style-name="P129">範圍查詢效率較低</text:p>
              </text:list-item>
            </text:list>
          </table:table-cell>
          <table:table-cell table:style-name="表格108.B1" office:value-type="string">
            <text:p text:style-name="P21">B+Tree</text:p>
            <text:list text:continue-numbering="true" text:style-name="WWNum2">
              <text:list-item>
                <text:p text:style-name="P129">內部節點只存 key，data 只放葉節點</text:p>
              </text:list-item>
              <text:list-item>
                <text:p text:style-name="P129">搜尋一定走到葉節點才結束</text:p>
              </text:list-item>
              <text:list-item>
                <text:p text:style-name="P129">所有葉節點串成一條 Linked List，範圍查詢超快</text:p>
              </text:list-item>
            </text:list>
          </table:table-cell>
        </table:table-row>
      </table:table>
      <text:p text:style-name="P108"/>
      <text:p text:style-name="P82">B+Tree 葉節點結構（示意）：</text:p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30"><text:s text:c="2"/>... ← [10|data] ↔ [20|data] ↔ [30|data] ↔ [40|data] → ...</text:p>
            <text:p text:style-name="P30"><text:s text:c="10"/>↑ 所有葉節點左右串聯，SELECT * WHERE key BETWEEN 20 AND 40</text:p>
            <text:p text:style-name="P30"><text:s text:c="12"/>只需找到 20，然後沿著鏈結直接讀到 40，不需再搜尋！</text:p>
          </table:table-cell>
        </table:table-row>
      </table:table>
      <text:p text:style-name="P108"/>
      <text:h text:style-name="P6" text:outline-level="2">BT-5　B-Tree 家族實際應用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row table:style-name="表格110.1">
          <table:table-cell table:style-name="表格110.A1" office:value-type="string">
            <text:p text:style-name="P76">應用場景</text:p>
          </table:table-cell>
          <table:table-cell table:style-name="表格110.A1" office:value-type="string">
            <text:p text:style-name="P76">使用的樹</text:p>
          </table:table-cell>
          <table:table-cell table:style-name="表格110.A1" office:value-type="string">
            <text:p text:style-name="P76">原因</text:p>
          </table:table-cell>
        </table:table-row>
        <table:table-row table:style-name="表格110.1">
          <table:table-cell table:style-name="表格110.A2" office:value-type="string">
            <text:p text:style-name="P76">MySQL InnoDB</text:p>
          </table:table-cell>
          <table:table-cell table:style-name="表格110.B2" office:value-type="string">
            <text:p text:style-name="P82">B+Tree</text:p>
          </table:table-cell>
          <table:table-cell table:style-name="表格110.C2" office:value-type="string">
            <text:p text:style-name="P82">葉節點串鏈，範圍查詢快</text:p>
          </table:table-cell>
        </table:table-row>
        <table:table-row table:style-name="表格110.1">
          <table:table-cell table:style-name="表格110.A3" office:value-type="string">
            <text:p text:style-name="P76">PostgreSQL</text:p>
          </table:table-cell>
          <table:table-cell table:style-name="表格110.B3" office:value-type="string">
            <text:p text:style-name="P82">B+Tree</text:p>
          </table:table-cell>
          <table:table-cell table:style-name="表格110.C3" office:value-type="string">
            <text:p text:style-name="P82">主索引標準結構</text:p>
          </table:table-cell>
        </table:table-row>
        <table:table-row table:style-name="表格110.1">
          <table:table-cell table:style-name="表格110.A4" office:value-type="string">
            <text:p text:style-name="P76">SQLite</text:p>
          </table:table-cell>
          <table:table-cell table:style-name="表格110.B4" office:value-type="string">
            <text:p text:style-name="P82">B+Tree</text:p>
          </table:table-cell>
          <table:table-cell table:style-name="表格110.C4" office:value-type="string">
            <text:p text:style-name="P82">嵌入式資料庫標準</text:p>
          </table:table-cell>
        </table:table-row>
        <table:table-row table:style-name="表格110.1">
          <table:table-cell table:style-name="表格110.A5" office:value-type="string">
            <text:p text:style-name="P76">NTFS 檔案系統</text:p>
          </table:table-cell>
          <table:table-cell table:style-name="表格110.B5" office:value-type="string">
            <text:p text:style-name="P82">B+Tree</text:p>
          </table:table-cell>
          <table:table-cell table:style-name="表格110.C5" office:value-type="string">
            <text:p text:style-name="P82">目錄樹搜尋</text:p>
          </table:table-cell>
        </table:table-row>
        <table:table-row table:style-name="表格110.1">
          <table:table-cell table:style-name="表格110.A6" office:value-type="string">
            <text:p text:style-name="P76">ext4 檔案系統</text:p>
          </table:table-cell>
          <table:table-cell table:style-name="表格110.B6" office:value-type="string">
            <text:p text:style-name="P82">HTree（B-Tree衍生）</text:p>
          </table:table-cell>
          <table:table-cell table:style-name="表格110.C6" office:value-type="string">
            <text:p text:style-name="P82">大目錄索引</text:p>
          </table:table-cell>
        </table:table-row>
      </table:table>
      <text:p text:style-name="P108"/>
      <text:h text:style-name="P114" text:outline-level="2"><text:soft-page-break/><text:span text:style-name="T76">三種樹完整比較總表</text:span></text:h>
      <table:table table:name="表格111" table:style-name="表格111">
        <table:table-column table:style-name="表格111.A"/>
        <table:table-column table:style-name="表格111.B" table:number-columns-repeated="3"/>
        <table:table-row table:style-name="表格111.1">
          <table:table-cell table:style-name="表格111.A1" office:value-type="string">
            <text:p text:style-name="P20">比較項目</text:p>
          </table:table-cell>
          <table:table-cell table:style-name="表格111.B1" office:value-type="string">
            <text:p text:style-name="P76">AVL Tree</text:p>
          </table:table-cell>
          <table:table-cell table:style-name="表格111.C1" office:value-type="string">
            <text:p text:style-name="P104">Red-Black Tree</text:p>
          </table:table-cell>
          <table:table-cell table:style-name="表格111.B1" office:value-type="string">
            <text:p text:style-name="P76">B-Tree / B+Tree</text:p>
          </table:table-cell>
        </table:table-row>
        <table:table-row table:style-name="表格111.1">
          <table:table-cell table:style-name="表格111.A2" office:value-type="string">
            <text:p text:style-name="P20">是否為二元樹</text:p>
          </table:table-cell>
          <table:table-cell table:style-name="表格111.B2" office:value-type="string">
            <text:p text:style-name="P82">✔ 是</text:p>
          </table:table-cell>
          <table:table-cell table:style-name="表格111.C2" office:value-type="string">
            <text:p text:style-name="P82">✔ 是</text:p>
          </table:table-cell>
          <table:table-cell table:style-name="表格111.D2" office:value-type="string">
            <text:p text:style-name="P82">✘ 否（多元樹）</text:p>
          </table:table-cell>
        </table:table-row>
        <table:table-row table:style-name="表格111.1">
          <table:table-cell table:style-name="表格111.A2" office:value-type="string">
            <text:p text:style-name="P20">是否為 BST</text:p>
          </table:table-cell>
          <table:table-cell table:style-name="表格111.B3" office:value-type="string">
            <text:p text:style-name="P82">✔ 是</text:p>
          </table:table-cell>
          <table:table-cell table:style-name="表格111.C3" office:value-type="string">
            <text:p text:style-name="P82">✔ 是</text:p>
          </table:table-cell>
          <table:table-cell table:style-name="表格111.D3" office:value-type="string">
            <text:p text:style-name="P82">✔ 類似（多 key）</text:p>
          </table:table-cell>
        </table:table-row>
        <table:table-row table:style-name="表格111.1">
          <table:table-cell table:style-name="表格111.A2" office:value-type="string">
            <text:p text:style-name="P20">每節點子節點數</text:p>
          </table:table-cell>
          <table:table-cell table:style-name="表格111.B4" office:value-type="string">
            <text:p text:style-name="P82">最多 2</text:p>
          </table:table-cell>
          <table:table-cell table:style-name="表格111.C4" office:value-type="string">
            <text:p text:style-name="P82">最多 2</text:p>
          </table:table-cell>
          <table:table-cell table:style-name="表格111.D4" office:value-type="string">
            <text:p text:style-name="P82">最多 m（階數）</text:p>
          </table:table-cell>
        </table:table-row>
        <table:table-row table:style-name="表格111.1">
          <table:table-cell table:style-name="表格111.A2" office:value-type="string">
            <text:p text:style-name="P20">平衡方式</text:p>
          </table:table-cell>
          <table:table-cell table:style-name="表格111.B5" office:value-type="string">
            <text:p text:style-name="P82">BF ≤ 1（旋轉）</text:p>
          </table:table-cell>
          <table:table-cell table:style-name="表格111.C5" office:value-type="string">
            <text:p text:style-name="P82">顏色規則（旋轉）</text:p>
          </table:table-cell>
          <table:table-cell table:style-name="表格111.D5" office:value-type="string">
            <text:p text:style-name="P82">節點分裂/合併</text:p>
          </table:table-cell>
        </table:table-row>
        <table:table-row table:style-name="表格111.1">
          <table:table-cell table:style-name="表格111.A2" office:value-type="string">
            <text:p text:style-name="P20">高度</text:p>
          </table:table-cell>
          <table:table-cell table:style-name="表格111.B6" office:value-type="string">
            <text:p text:style-name="P82">最矮</text:p>
          </table:table-cell>
          <table:table-cell table:style-name="表格111.C6" office:value-type="string">
            <text:p text:style-name="P82">略高</text:p>
          </table:table-cell>
          <table:table-cell table:style-name="表格111.D6" office:value-type="string">
            <text:p text:style-name="P82">很矮（底數大）</text:p>
          </table:table-cell>
        </table:table-row>
        <table:table-row table:style-name="表格111.1">
          <table:table-cell table:style-name="表格111.A2" office:value-type="string">
            <text:p text:style-name="P20">搜尋</text:p>
          </table:table-cell>
          <table:table-cell table:style-name="表格111.B7" office:value-type="string">
            <text:p text:style-name="P82">O(log n)</text:p>
          </table:table-cell>
          <table:table-cell table:style-name="表格111.C7" office:value-type="string">
            <text:p text:style-name="P82">O(log n)</text:p>
          </table:table-cell>
          <table:table-cell table:style-name="表格111.D7" office:value-type="string">
            <text:p text:style-name="P82">O(log n)，I/O少</text:p>
          </table:table-cell>
        </table:table-row>
        <table:table-row table:style-name="表格111.1">
          <table:table-cell table:style-name="表格111.A2" office:value-type="string">
            <text:p text:style-name="P20">插入/刪除</text:p>
          </table:table-cell>
          <table:table-cell table:style-name="表格111.B8" office:value-type="string">
            <text:p text:style-name="P82">O(log n)，旋轉多</text:p>
          </table:table-cell>
          <table:table-cell table:style-name="表格111.C8" office:value-type="string">
            <text:p text:style-name="P82">O(log n)，旋轉少</text:p>
          </table:table-cell>
          <table:table-cell table:style-name="表格111.D8" office:value-type="string">
            <text:p text:style-name="P82">O(log n)，分裂/合併</text:p>
          </table:table-cell>
        </table:table-row>
        <table:table-row table:style-name="表格111.1">
          <table:table-cell table:style-name="表格111.A2" office:value-type="string">
            <text:p text:style-name="P20">存放位置</text:p>
          </table:table-cell>
          <table:table-cell table:style-name="表格111.B9" office:value-type="string">
            <text:p text:style-name="P82">記憶體</text:p>
          </table:table-cell>
          <table:table-cell table:style-name="表格111.C9" office:value-type="string">
            <text:p text:style-name="P82">記憶體</text:p>
          </table:table-cell>
          <table:table-cell table:style-name="表格111.D9" office:value-type="string">
            <text:p text:style-name="P82">磁碟（資料庫）</text:p>
          </table:table-cell>
        </table:table-row>
        <table:table-row table:style-name="表格111.1">
          <table:table-cell table:style-name="表格111.A2" office:value-type="string">
            <text:p text:style-name="P20">主要應用</text:p>
          </table:table-cell>
          <table:table-cell table:style-name="表格111.B10" office:value-type="string">
            <text:p text:style-name="P82">特殊記憶體搜尋</text:p>
          </table:table-cell>
          <table:table-cell table:style-name="表格111.C10" office:value-type="string">
            <text:p text:style-name="P82">C++ map / Java / Linux</text:p>
          </table:table-cell>
          <table:table-cell table:style-name="表格111.D10" office:value-type="string">
            <text:p text:style-name="P82">資料庫索引、檔案系統</text:p>
          </table:table-cell>
        </table:table-row>
      </table:table>
      <text:p text:style-name="P108"/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54">🎯 核心記憶口訣：</text:p>
            <text:p text:style-name="P54">AVL Tree = 二元樹 + 嚴格平衡（BF ≤ 1）→ 讀多寫少場景</text:p>
            <text:p text:style-name="P54">Red-Black Tree = 二元樹 + 顏色規則 → 讀寫平衡場景（最常用）</text:p>
            <text:p text:style-name="P54">B-Tree = 多元樹 + 磁碟優化 → 資料庫/檔案系統（不是二元樹！）</text:p>
          </table:table-cell>
        </table:table-row>
      </table:table>
      <text:p text:style-name="P115"/>
      <text:h text:style-name="P24" text:outline-level="1">第四章：樹的走訪（Traversal）</text:h>
      <text:p text:style-name="P34">走訪 = 「按照某種順序，把樹上每個節點拜訪一次」。共有四種主要方法。</text:p>
      <text:p text:style-name="P11"/>
      <text:h text:style-name="P3" text:outline-level="2">4.1 範例樹（本章全部用這棵）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6"><text:s text:c="9"/>A</text:p>
            <text:p text:style-name="P26"><text:s text:c="8"/>/ \</text:p>
            <text:p text:style-name="P26"><text:s text:c="7"/>B <text:s text:c="2"/>C</text:p>
            <text:p text:style-name="P26"><text:s text:c="6"/>/ \</text:p>
            <text:p text:style-name="P26"><text:s text:c="5"/>D <text:s text:c="2"/>E</text:p>
          </table:table-cell>
        </table:table-row>
      </table:table>
      <text:p text:style-name="P11"/>
      <text:h text:style-name="P3" text:outline-level="2">4.2 DFS 深度優先搜尋（三種）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3">DFS = Depth First Search = 一路鑽到底，再回頭</text:p>
          </table:table-cell>
        </table:table-row>
      </table:table>
      <text:p text:style-name="P11"/>
      <text:p text:style-name="P68">① Preorder（前序）：根 → 左 → 右</text:p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26">步驟：A → B → D → （D沒子節點，回） → E → （回到B完成） → C</text:p>
            <text:p text:style-name="P26">結果：A <text:s/>B <text:s/>D <text:s/>E <text:s/>C</text:p>
            <text:p text:style-name="P11"/>
            <text:p text:style-name="P26">口訣：「先吃主食（根），再吃左菜，最後右菜」</text:p>
          </table:table-cell>
        </table:table-row>
      </table:table>
      <text:p text:style-name="P68">② Inorder（中序）：左 → 根 → 右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6">步驟：D → B → E → A → C</text:p>
            <text:p text:style-name="P26">結果：D <text:s/>B <text:s/>E <text:s/>A <text:s/>C</text:p>
            <text:p text:style-name="P11"/>
            <text:p text:style-name="P26">口訣：「先左邊的人說話，主人（根）再說，最後右邊說」</text:p>
            <text:p text:style-name="P26">特性：BST 的 Inorder 結果 = 遞增排序！</text:p>
          </table:table-cell>
        </table:table-row>
      </table:table>
      <text:p text:style-name="P68">③ Postorder（後序）：左 → 右 → 根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6">步驟：D → E → B → C → A</text:p>
            <text:p text:style-name="P26">結果：D <text:s/>E <text:s/>B <text:s/>C <text:s/>A</text:p>
            <text:p text:style-name="P11"/>
            <text:p text:style-name="P26">口訣：「最後才輪到主人（根）說話」</text:p>
            <text:p text:style-name="P26">應用：計算樹的大小時常用（先算子樹，再算自己）</text:p>
          </table:table-cell>
        </table:table-row>
      </table:table>
      <text:p text:style-name="P11"/>
      <table:table table:name="表格24" table:style-name="表格24">
        <table:table-column table:style-name="表格24.A" table:number-columns-repeated="2"/>
        <table:table-row table:style-name="表格24.1">
          <table:table-cell table:style-name="表格24.A1" office:value-type="string">
            <text:p text:style-name="P22">走訪方式</text:p>
            <text:p text:style-name="P34">Preorder（前序）</text:p>
            <text:p text:style-name="P34">Inorder（中序）</text:p>
            <text:p text:style-name="P34">Postorder（後序）</text:p>
          </table:table-cell>
          <table:table-cell table:style-name="表格24.B1" office:value-type="string">
            <text:p text:style-name="P22">結果</text:p>
            <text:p text:style-name="P34">A B D E C</text:p>
            <text:p text:style-name="P34">D B E A C</text:p>
            <text:p text:style-name="P34">D E B C A</text:p>
          </table:table-cell>
        </table:table-row>
      </table:table>
      <text:p text:style-name="P11"/>
      <text:h text:style-name="P117" text:outline-level="2"><text:soft-page-break/><text:span text:style-name="T76">4.3 BFS 廣度優先搜尋（Level-order）</text:span></text:h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74">BFS = Breadth First Search = 一層一層掃描，使用 Queue（佇列）實作</text:p>
          </table:table-cell>
        </table:table-row>
        <table:table-row table:style-name="表格25.1">
          <table:table-cell table:style-name="表格25.A2" office:value-type="string">
            <text:p text:style-name="P26">第1層：A</text:p>
            <text:p text:style-name="P26">第2層：B <text:s/>C</text:p>
            <text:p text:style-name="P26">第3層：D <text:s/>E</text:p>
            <text:p text:style-name="P11"/>
            <text:p text:style-name="P26">Level-order 結果：A <text:s/>B <text:s/>C <text:s/>D <text:s/>E</text:p>
          </table:table-cell>
        </table:table-row>
      </table:table>
      <text:p text:style-name="P34">BFS 使用 Queue（先進先出）：先把 A 放入 Queue → 取出 A，放入 B、C → 取出 B，放入 D、E → 取出 C（無子節點）→ 取出 D → 取出 E</text:p>
      <text:p text:style-name="P11"/>
      <text:h text:style-name="P3" text:outline-level="2">4.4 DFS vs BFS 比較表</text:h>
      <table:table table:name="表格26" table:style-name="表格26">
        <table:table-column table:style-name="表格26.A" table:number-columns-repeated="2"/>
        <table:table-row table:style-name="表格26.1">
          <table:table-cell table:style-name="表格26.A1" office:value-type="string">
            <text:p text:style-name="P22">DFS（深度優先）</text:p>
            <text:p text:style-name="P34">一路往深處鑽</text:p>
            <text:p text:style-name="P34">使用 Stack（堆疊）/ 遞迴</text:p>
            <text:p text:style-name="P34">三種：Preorder / Inorder / Postorder</text:p>
            <text:p text:style-name="P34">應用：樹走訪、Backtracking、路徑搜尋</text:p>
          </table:table-cell>
          <table:table-cell table:style-name="表格26.B1" office:value-type="string">
            <text:p text:style-name="P22">BFS（廣度優先）</text:p>
            <text:p text:style-name="P34">一層一層掃描</text:p>
            <text:p text:style-name="P34">使用 Queue（佇列）</text:p>
            <text:p text:style-name="P34">一種：Level-order</text:p>
            <text:p text:style-name="P34">應用：最短路徑、社交網路距離</text:p>
          </table:table-cell>
        </table:table-row>
      </table:table>
      <text:p text:style-name="P11"/>
      <text:h text:style-name="P3" text:outline-level="2">4.5 遞迴程式碼（Preorder 範例）</text:h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6">void preorder(Node* node) {</text:p>
            <text:p text:style-name="P26"><text:s text:c="4"/>if (node == NULL) return; <text:s text:c="2"/>// 邊界條件</text:p>
            <text:p text:style-name="P26"><text:s text:c="4"/>visit(node); <text:s text:c="15"/>// ① 先拜訪自己（根）</text:p>
            <text:p text:style-name="P26"><text:s text:c="4"/>preorder(node-&gt;left); <text:s text:c="6"/>// ② 再遞迴左子樹</text:p>
            <text:p text:style-name="P26"><text:s text:c="4"/>preorder(node-&gt;right); <text:s text:c="5"/>// ③ 最後遞迴右子樹</text:p>
            <text:p text:style-name="P26">}</text:p>
            <text:p text:style-name="P11"/>
            <text:p text:style-name="P26">// Inorder：把 visit 移到 ② 和 ③ 之間</text:p>
            <text:p text:style-name="P26">// Postorder：把 visit 移到最後</text:p>
          </table:table-cell>
        </table:table-row>
      </table:table>
      <text:p text:style-name="Standard"/>
      <text:h text:style-name="P24" text:outline-level="1">第五章：唯一重建樹</text:h>
      <text:h text:style-name="P3" text:outline-level="2">5.1 哪些組合可以唯一重建？</text:h>
      <table:table table:name="表格28" table:style-name="表格28">
        <table:table-column table:style-name="表格28.A" table:number-columns-repeated="3"/>
        <table:table-row table:style-name="表格28.1">
          <table:table-cell table:style-name="表格28.A1" office:value-type="string">
            <text:p text:style-name="P17">組合</text:p>
          </table:table-cell>
          <table:table-cell table:style-name="表格28.A1" office:value-type="string">
            <text:p text:style-name="P17">可唯一重建？</text:p>
          </table:table-cell>
          <table:table-cell table:style-name="表格28.A1" office:value-type="string">
            <text:p text:style-name="P17">原因</text:p>
          </table:table-cell>
        </table:table-row>
        <table:table-row table:style-name="表格28.1">
          <table:table-cell table:style-name="表格28.A2" office:value-type="string">
            <text:p text:style-name="P34">前序 + 中序</text:p>
          </table:table-cell>
          <table:table-cell table:style-name="表格28.B2" office:value-type="string">
            <text:p text:style-name="P49">✅ 可以</text:p>
          </table:table-cell>
          <table:table-cell table:style-name="表格28.C2" office:value-type="string">
            <text:p text:style-name="P34">中序可切出左右子樹</text:p>
          </table:table-cell>
        </table:table-row>
        <table:table-row table:style-name="表格28.1">
          <table:table-cell table:style-name="表格28.A3" office:value-type="string">
            <text:p text:style-name="P34">後序 + 中序</text:p>
          </table:table-cell>
          <table:table-cell table:style-name="表格28.B2" office:value-type="string">
            <text:p text:style-name="P49">✅ 可以</text:p>
          </table:table-cell>
          <table:table-cell table:style-name="表格28.C3" office:value-type="string">
            <text:p text:style-name="P34">後序最後一個 = 根，中序切左右</text:p>
          </table:table-cell>
        </table:table-row>
        <table:table-row table:style-name="表格28.1">
          <table:table-cell table:style-name="表格28.A4" office:value-type="string">
            <text:p text:style-name="P34">前序 + 後序</text:p>
          </table:table-cell>
          <table:table-cell table:style-name="表格28.B4" office:value-type="string">
            <text:p text:style-name="P60">❌ 不唯一</text:p>
          </table:table-cell>
          <table:table-cell table:style-name="表格28.C4" office:value-type="string">
            <text:p text:style-name="P34">無法確定左右分界</text:p>
          </table:table-cell>
        </table:table-row>
      </table:table>
      <text:p text:style-name="P11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39">⚠️ 前序 + 後序何時例外可唯一重建？</text:p>
            <text:p text:style-name="P39">→ 只有當樹中沒有 degree=1 的節點（即 Full Binary Tree）時，才能唯一重建。</text:p>
            <text:p text:style-name="P39">→ 若有 degree=1 的節點，則共有 2^k 種可能（k = degree-1 節點數）。</text:p>
            <text:p text:style-name="P39">→ 這就是圖片右欄「前+後=8種（deg-1節數）」的意思！</text:p>
          </table:table-cell>
        </table:table-row>
      </table:table>
      <text:p text:style-name="P11"/>
      <text:h text:style-name="P3" text:outline-level="2">5.2 前序 + 中序重建步驟（完整範例）</text:h>
      <text:p text:style-name="P34">已知：</text:p>
      <text:list text:style-name="WWNum3">
        <text:list-item text:start-value="1">
          <text:p text:style-name="P130">前序（Preorder）：A B C D E F G H I</text:p>
        </text:list-item>
        <text:list-item>
          <text:p text:style-name="P130">中序（Inorder）：B C A E D G H F I</text:p>
        </text:list-item>
      </text:list>
      <text:p text:style-name="P11"/>
      <text:p text:style-name="P34">步驟一：Preorder 第一個 = A = root</text:p>
      <text:p text:style-name="P34">步驟二：在 Inorder 找 A → 左邊 {B C} = 左子樹；右邊 {E D G H F I} = 右子樹</text:p>
      <text:p text:style-name="P34">步驟三：Preorder 中，A 後面2個（B C）對應左子樹 → 第一個 B = 左子樹 root</text:p>
      <text:p text:style-name="P34">步驟四：在 Inorder {B C} 找 B → 左邊 {} 空 → 右邊 {C}</text:p>
      <text:p text:style-name="P34">步驟五：繼續遞迴處理右子樹……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26">最終重建結果：</text:p>
            <text:p text:style-name="P26"><text:s text:c="12"/>A</text:p>
            <text:p text:style-name="P26"><text:s text:c="11"/>/ \</text:p>
            <text:p text:style-name="P26"><text:s text:c="10"/>B <text:s text:c="2"/>D</text:p>
            <text:p text:style-name="P26"><text:s text:c="11"/>\ <text:s/>/ \</text:p>
            <text:p text:style-name="P26"><text:s text:c="12"/>C E <text:s/>F</text:p>
            <text:p text:style-name="P26"><text:s text:c="14"/>/ / \</text:p>
            <text:p text:style-name="P26"><text:s text:c="13"/>G H <text:s text:c="2"/>I</text:p>
            <text:p text:style-name="P26">（注意：這是113高考Q1的典型題型）</text:p>
          </table:table-cell>
        </table:table-row>
      </table:table>
      <text:p text:style-name="Standard"/>
      <text:h text:style-name="P24" text:outline-level="1">第六章：Complete Binary Tree vs Full Binary Tree</text:h>
      <text:h text:style-name="P3" text:outline-level="2">6.1 Complete Binary Tree（完全二元樹）</text:h>
      <table:table table:name="表格33" table:style-name="表格33">
        <table:table-column table:style-name="表格33.A" table:number-columns-repeated="2"/>
        <table:table-row table:style-name="表格33.1">
          <table:table-cell table:style-name="表格33.A1" table:number-columns-spanned="2" office:value-type="string">
            <text:p text:style-name="P13">定義：</text:p>
            <text:p text:style-name="P13">1. 除了最後一層，其餘各層節點數都要全滿。</text:p>
            <text:p text:style-name="P13">2. 最後一層的節點必須「靠左連續排列」。</text:p>
          </table:table-cell>
          <table:covered-table-cell/>
        </table:table-row>
        <table:table-row table:style-name="表格33.1">
          <table:table-cell table:style-name="表格33.A2" office:value-type="string">
            <text:p text:style-name="P46">✅ 合法</text:p>
            <table:table table:name="表格31" table:style-name="表格31">
              <table:table-column table:style-name="表格31.A"/>
              <table:table-row table:style-name="表格31.1">
                <table:table-cell table:style-name="表格31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5"/>/ \</text:p>
                  <text:p text:style-name="P26"><text:s text:c="4"/>D <text:s text:c="2"/>E</text:p>
                </table:table-cell>
              </table:table-row>
              <table:table-row table:style-name="表格31.1">
                <table:table-cell table:style-name="表格31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5"/>/ \ /</text:p>
                  <text:p text:style-name="P26"><text:s text:c="4"/>D <text:s/>E F</text:p>
                </table:table-cell>
              </table:table-row>
            </table:table>
            <text:p text:style-name="Standard"/>
          </table:table-cell>
          <table:table-cell table:style-name="表格33.B2" office:value-type="string">
            <text:p text:style-name="P57">❌ 不合法（空洞在左邊）</text:p>
            <table:table table:name="表格32" table:style-name="表格32">
              <table:table-column table:style-name="表格32.A"/>
              <table:table-row table:style-name="表格32.1">
                <table:table-cell table:style-name="表格32.A1" office:value-type="string">
                  <text:p text:style-name="P26"><text:s text:c="8"/>A</text:p>
                  <text:p text:style-name="P26"><text:s text:c="7"/>/ \</text:p>
                  <text:p text:style-name="P26"><text:s text:c="6"/>B <text:s text:c="2"/>C</text:p>
                  <text:p text:style-name="P26"><text:s text:c="9"/>/</text:p>
                  <text:p text:style-name="P26"><text:s text:c="8"/>D</text:p>
                </table:table-cell>
              </table:table-row>
            </table:table>
            <text:p text:style-name="P34">最後一層的 D 在右邊，左邊是空的 → 違反靠左規則</text:p>
          </table:table-cell>
        </table:table-row>
      </table:table>
      <text:p text:style-name="P11"/>
      <text:h text:style-name="P3" text:outline-level="2">6.2 Complete Binary Tree 節點數範圍（115高考Q2重點）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3">定義（圖片考試筆記原文）：除末層外全滿 2 層，末層靠左</text:p>
            <text:p text:style-name="P38"/>
            <text:p text:style-name="P13">前 h-1 層節點數（全滿）：2^(h-1) − 1</text:p>
            <text:p text:style-name="P13">末層至少 1 個：總節點數 ≥ 2^(h-1) − 1 + 1 = 2^(h-1)</text:p>
            <text:p text:style-name="P13">末層全滿時：總節點數 ≤ 2^(h-1) − 1 + 2^(h-1) = 2^h − 1</text:p>
            <text:p text:style-name="P38"/>
            <text:p text:style-name="P13">結論：2^(h-1) ≤ n ≤ 2^h − 1 <text:s/>（就是考試筆記中的公式！）</text:p>
          </table:table-cell>
        </table:table-row>
      </table:table>
      <text:p text:style-name="P11"/>
      <text:h text:style-name="P3" text:outline-level="2">6.3 Full Binary Tree（完滿二元樹）</text:h>
      <table:table table:name="表格37" table:style-name="表格37">
        <table:table-column table:style-name="表格37.A" table:number-columns-repeated="2"/>
        <table:table-row table:style-name="表格37.1">
          <table:table-cell table:style-name="表格37.A1" table:number-columns-spanned="2" office:value-type="string">
            <text:p text:style-name="P74">定義：每個節點的子節點數只能是 0 或 2，不能是 1。</text:p>
            <text:p text:style-name="P74">（有人也叫「Strictly Binary Tree」）</text:p>
          </table:table-cell>
          <table:covered-table-cell/>
        </table:table-row>
        <table:table-row table:style-name="表格37.1">
          <table:table-cell table:style-name="表格37.A2" office:value-type="string">
            <text:p text:style-name="P46">✅ 合法</text:p>
            <table:table table:name="表格35" table:style-name="表格35">
              <table:table-column table:style-name="表格35.A"/>
              <table:table-row table:style-name="表格35.1">
                <table:table-cell table:style-name="表格35.A1" office:value-type="string">
                  <text:p text:style-name="P26"><text:s text:c="4"/>A</text:p>
                  <text:p text:style-name="P26"><text:s text:c="3"/>/ \</text:p>
                  <text:p text:style-name="P26"><text:s text:c="2"/>B <text:s text:c="2"/>C</text:p>
                  <text:p text:style-name="P26"><text:s text:c="5"/>/ \</text:p>
                  <text:p text:style-name="P26"><text:s text:c="4"/>D <text:s text:c="2"/>E</text:p>
                </table:table-cell>
              </table:table-row>
            </table:table>
            <text:p text:style-name="Standard"/>
          </table:table-cell>
          <table:table-cell table:style-name="表格37.B2" office:value-type="string">
            <text:p text:style-name="P57">❌ 不合法（A 只有一個 child）</text:p>
            <table:table table:name="表格36" table:style-name="表格36">
              <table:table-column table:style-name="表格36.A"/>
              <table:table-row table:style-name="表格36.1">
                <table:table-cell table:style-name="表格36.A1" office:value-type="string">
                  <text:p text:style-name="P26"><text:s text:c="4"/>A</text:p>
                  <text:p text:style-name="P26"><text:s text:c="3"/>/</text:p>
                  <text:p text:style-name="P26"><text:s text:c="2"/>B</text:p>
                </table:table-cell>
              </table:table-row>
            </table:table>
            <text:p text:style-name="Standard"/>
          </table:table-cell>
        </table:table-row>
      </table:table>
      <text:p text:style-name="P11"><text:soft-page-break/></text:p>
      <text:h text:style-name="P3" text:outline-level="2">6.4 Complete vs Full 總整理</text:h>
      <table:table table:name="表格38" table:style-name="表格38">
        <table:table-column table:style-name="表格38.A" table:number-columns-repeated="2"/>
        <table:table-row table:style-name="表格38.1">
          <table:table-cell table:style-name="表格38.A1" office:value-type="string">
            <text:p text:style-name="P22">Complete Binary Tree</text:p>
            <text:p text:style-name="P34">限制「形狀」</text:p>
            <text:p text:style-name="P34">最後一層靠左</text:p>
            <text:p text:style-name="P34">Heap 一定是 CBT</text:p>
            <text:p text:style-name="P34">可以有 degree=1 的節點</text:p>
          </table:table-cell>
          <table:table-cell table:style-name="表格38.B1" office:value-type="string">
            <text:p text:style-name="P22">Full Binary Tree</text:p>
            <text:p text:style-name="P34">限制「每個節點的度數」</text:p>
            <text:p text:style-name="P34">每節點 0 或 2 個 child</text:p>
            <text:p text:style-name="P34">不一定是 CBT</text:p>
            <text:p text:style-name="P34">degree=1 的節點一個也沒有</text:p>
          </table:table-cell>
        </table:table-row>
      </table:table>
      <text:p text:style-name="Standard"/>
      <text:h text:style-name="P24" text:outline-level="1">第七章：Heap 與 Priority Queue</text:h>
      <text:h text:style-name="P3" text:outline-level="2">7.1 Heap 定義</text:h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18">Heap = 完全二元樹（Complete Binary Tree）+ 父子大小關係</text:p>
            <text:p text:style-name="P38"/>
            <text:p text:style-name="P118">Max Heap：每個父節點 ≥ 子節點（最大值永遠在 root）</text:p>
            <text:p text:style-name="P118">Min Heap：每個父節點 ≤ 子節點（最小值永遠在 root）</text:p>
          </table:table-cell>
        </table:table-row>
      </table:table>
      <text:p text:style-name="P11"/>
      <table:table table:name="表格42" table:style-name="表格42">
        <table:table-column table:style-name="表格42.A" table:number-columns-repeated="2"/>
        <table:table-row table:style-name="表格42.1">
          <table:table-cell table:style-name="表格42.A1" office:value-type="string">
            <text:p text:style-name="P22">Max Heap 範例</text:p>
            <table:table table:name="表格40" table:style-name="表格40">
              <table:table-column table:style-name="表格40.A"/>
              <table:table-row table:style-name="表格40.1">
                <table:table-cell table:style-name="表格40.A1" office:value-type="string">
                  <text:p text:style-name="P26"><text:s text:c="6"/>100</text:p>
                  <text:p text:style-name="P26"><text:s text:c="5"/>/ <text:s text:c="2"/>\</text:p>
                  <text:p text:style-name="P26"><text:s text:c="4"/>80 <text:s text:c="3"/>50</text:p>
                  <text:p text:style-name="P26"><text:s text:c="3"/>/ <text:s/>\</text:p>
                  <text:p text:style-name="P26"><text:s text:c="2"/>30 <text:s text:c="2"/>20</text:p>
                </table:table-cell>
              </table:table-row>
            </table:table>
            <text:p text:style-name="P34">100 ≥ 80 ≥ 50 ≥ 30 ≥ 20 <text:s/>✔</text:p>
          </table:table-cell>
          <table:table-cell table:style-name="表格42.B1" office:value-type="string">
            <text:p text:style-name="P22">Min Heap 範例</text:p>
            <table:table table:name="表格41" table:style-name="表格41">
              <table:table-column table:style-name="表格41.A"/>
              <table:table-row table:style-name="表格41.1">
                <table:table-cell table:style-name="表格41.A1" office:value-type="string">
                  <text:p text:style-name="P26"><text:s text:c="7"/>10</text:p>
                  <text:p text:style-name="P26"><text:s text:c="6"/>/ <text:s/>\</text:p>
                  <text:p text:style-name="P26"><text:s text:c="4"/>20 <text:s text:c="3"/>15</text:p>
                  <text:p text:style-name="P26"><text:s text:c="3"/>/ <text:s/>\</text:p>
                  <text:p text:style-name="P26"><text:s text:c="2"/>30 <text:s text:c="2"/>25</text:p>
                </table:table-cell>
              </table:table-row>
            </table:table>
            <text:p text:style-name="P34">10 ≤ 20 ≤ 30 ≤ 25 <text:s/>✔</text:p>
          </table:table-cell>
        </table:table-row>
      </table:table>
      <text:p text:style-name="P11"/>
      <text:h text:style-name="P3" text:outline-level="2">7.2 Heap vs BST（超容易搞混！）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39">Heap：只管「父 &gt; 子」（或父 &lt; 子），左右之間沒有大小關係</text:p>
            <text:p text:style-name="P39">BST：嚴格規定「左 &lt; 根 &lt; 右」</text:p>
            <text:p text:style-name="P38"/>
            <text:p text:style-name="P39">例： <text:s text:c="6"/>100 <text:s text:c="10"/>← Max Heap ✅（100&gt;80, 100&gt;50）</text:p>
            <text:p text:style-name="P39"><text:s text:c="10"/>/ <text:s text:c="2"/>\</text:p>
            <text:p text:style-name="P39"><text:s text:c="9"/>80 <text:s text:c="3"/>50 <text:s text:c="7"/>← Heap 合法，但 BST 不合法</text:p>
            <text:p text:style-name="P39"><text:s text:c="25"/>（BST 右邊要比 80 大，但 50 &lt; 80）</text:p>
          </table:table-cell>
        </table:table-row>
      </table:table>
      <text:p text:style-name="P11"/>
      <text:h text:style-name="P3" text:outline-level="2">7.3 Priority Queue（優先權佇列）</text:h>
      <text:p text:style-name="P34">現實比喻：急診室掛號——不是先來先看診，而是重傷優先。</text:p>
      <text:p text:style-name="P34">Heap 最適合實作 Priority Queue，因為：</text:p>
      <text:list text:continue-numbering="true" text:style-name="WWNum3">
        <text:list-item>
          <text:p text:style-name="P130">取出最大（或最小）值：只需取出 root → O(log n)</text:p>
        </text:list-item>
        <text:list-item>
          <text:p text:style-name="P130">插入新值：放在最後，向上浮（Sift Up）→ O(log n)</text:p>
        </text:list-item>
        <text:list-item>
          <text:p text:style-name="P130">Heap Sort 利用 Max Heap，可排序整個陣列 → O(n log n)</text:p>
        </text:list-item>
      </text:list>
      <text:p text:style-name="P11"/>
      <text:h text:style-name="P3" text:outline-level="2">7.4 Heap 的陣列表示</text:h>
      <text:p text:style-name="P34">因為 Heap 是完全二元樹，可以用陣列完美儲存（無浪費空間）：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26">index: <text:s/>1 <text:s text:c="2"/>2 <text:s text:c="2"/>3 <text:s text:c="2"/>4 <text:s text:c="2"/>5 <text:s text:c="2"/>6 <text:s text:c="2"/>7</text:p>
            <text:p text:style-name="P26">value: 100 <text:s/>80 <text:s/>50 <text:s/>30 <text:s/>20 <text:s/>.. <text:s/>..</text:p>
            <text:p text:style-name="P11"/>
            <text:p text:style-name="P11"><text:soft-page-break/><text:span text:style-name="T44">規則：</text:span></text:p>
            <text:p text:style-name="P26"><text:s text:c="2"/>root <text:s text:c="7"/>= a[1]</text:p>
            <text:p text:style-name="P26"><text:s text:c="2"/>left child <text:s/>= a[2i]</text:p>
            <text:p text:style-name="P26"><text:s text:c="2"/>right child = a[2i+1]</text:p>
            <text:p text:style-name="P26"><text:s text:c="2"/>parent <text:s text:c="5"/>= a[⌊i/2⌋]</text:p>
          </table:table-cell>
        </table:table-row>
      </table:table>
      <text:p text:style-name="Standard"/>
      <text:h text:style-name="P24" text:outline-level="1">第八章：陣列表示法（Array Representation）</text:h>
      <text:h text:style-name="P3" text:outline-level="2">8.1 為什麼可以用陣列？</text:h>
      <text:p text:style-name="P34">完全二元樹的形狀非常規律，因此可以直接用一維陣列儲存，不需要指標（pointer）。</text:p>
      <text:h text:style-name="P3" text:outline-level="2">8.2 公式（考試必背）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3">root <text:s text:c="7"/>= a[1]（注意：通常從 index=1 開始，不是 0）</text:p>
            <text:p text:style-name="P13">left child <text:s/>= a[2i]</text:p>
            <text:p text:style-name="P13">right child = a[2i+1]</text:p>
            <text:p text:style-name="P13">parent <text:s text:c="5"/>= a[⌊i/2⌋]（整數除法）</text:p>
          </table:table-cell>
        </table:table-row>
      </table:table>
      <text:p text:style-name="P11"/>
      <text:h text:style-name="P3" text:outline-level="2">8.3 公式推導（以實際範例驗證）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26"><text:s text:c="10"/>a[1]=A</text:p>
            <text:p text:style-name="P26"><text:s text:c="9"/>/ <text:s text:c="5"/>\</text:p>
            <text:p text:style-name="P26"><text:s text:c="6"/>a[2]=B <text:s text:c="3"/>a[3]=C</text:p>
            <text:p text:style-name="P26"><text:s text:c="6"/>/ <text:s text:c="3"/>\ <text:s text:c="3"/>/ <text:s text:c="3"/>\</text:p>
            <text:p text:style-name="P26"><text:s text:c="2"/>a[4]=D a[5]=E a[6]=F a[7]=G</text:p>
            <text:p text:style-name="P11"/>
            <text:p text:style-name="P26">驗證：</text:p>
            <text:p text:style-name="P26"><text:s text:c="2"/>i=1（A）→ left=a[2]=B ✔, right=a[3]=C ✔</text:p>
            <text:p text:style-name="P26"><text:s text:c="2"/>i=2（B）→ left=a[4]=D ✔, right=a[5]=E ✔</text:p>
            <text:p text:style-name="P26"><text:s text:c="2"/>i=3（C）→ left=a[6]=F ✔, right=a[7]=G ✔</text:p>
            <text:p text:style-name="P26"><text:s text:c="2"/>i=4（D）→ parent=a[2]=B ✔</text:p>
            <text:p text:style-name="P26"><text:s text:c="2"/>i=5（E）→ parent=a[2]=B ✔（5/2=2 整數除法）</text:p>
            <text:p text:style-name="P26"><text:s text:c="2"/>i=6（F）→ parent=a[3]=C ✔</text:p>
            <text:p text:style-name="P26"><text:s text:c="2"/>i=1024 → parent=a[512] ✔（圖片原文：2×512=1024）</text:p>
          </table:table-cell>
        </table:table-row>
      </table:table>
      <text:p text:style-name="P11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39">⚠️ 偏斜樹（Skewed Tree）的陣列浪費問題</text:p>
            <text:p text:style-name="P38"/>
            <text:p text:style-name="P39">偏斜樹高度 h 時只有 h 個節點，但陣列需要 2^h − 1 個空間。</text:p>
            <text:p text:style-name="P39">例：右偏斜樹 4 層（4 個節點）需要 2^4 − 1 = 15 個陣列空間，浪費了 11 格。</text:p>
            <text:p text:style-name="P39">→ 這就是「偏斜樹 = 最浪費」的原因（圖片考試筆記原文）。</text:p>
          </table:table-cell>
        </table:table-row>
      </table:table>
      <text:p text:style-name="Standard"/>
      <text:h text:style-name="P24" text:outline-level="1">第九章：歷屆考題詳解</text:h>
      <text:p text:style-name="P11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44">113高考 Q1 — 中序 + 後序重建樹</text:p>
          </table:table-cell>
        </table:table-row>
        <table:table-row table:style-name="表格48.1">
          <table:table-cell table:style-name="表格48.A2" office:value-type="string">
            <text:p text:style-name="P36">題目：</text:p>
            <text:p text:style-name="P36"><text:s text:c="2"/>中序（Inorder）：F B A C E I H J G E（圖片原文：FBAC IH JGE）</text:p>
            <text:p text:style-name="P36"><text:s text:c="2"/>後序（Postorder）：原文最後一個為 E</text:p>
            <text:p text:style-name="P38"/>
            <text:p text:style-name="P36">解題步驟：</text:p>
            <text:p text:style-name="P36">1. 後序最後一個 = E = root</text:p>
            <text:p text:style-name="P36">2. 在中序找 E，E 左邊 = 左子樹，右邊 = 右子樹</text:p>
            <text:p text:style-name="P36">3. 繼續遞迴：後序第二最後 = 右子樹 root，以此類推</text:p>
            <text:p text:style-name="P38"/>
            <text:p text:style-name="P36">重點：後序 + 中序一定能唯一重建！</text:p>
          </table:table-cell>
        </table:table-row>
      </table:table>
      <text:p text:style-name="P11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44">114高考 Q1 — 前序 ABCD + 後序 DCBA → 可能二元樹數量</text:p>
          </table:table-cell>
        </table:table-row>
        <table:table-row table:style-name="表格49.1">
          <table:table-cell table:style-name="表格49.A2" office:value-type="string">
            <text:p text:style-name="P36">題目：前序=ABCD，後序=DCBA，問共有幾種可能的二元樹？</text:p>
            <text:p text:style-name="P38"/>
            <text:p text:style-name="P36">分析：</text:p>
            <text:p text:style-name="P36">• 前序第一個=A=root，後序最後一個=A ✔</text:p>
            <text:p text:style-name="P36">• 前序第二個=B → B可以是A的左child或右child（兩種）</text:p>
            <text:p text:style-name="P36">• 每個 internal node（A,B,C）各有「貼左或右」2個選擇</text:p>
            <text:p text:style-name="P36">• 共 3 個這樣的節點 → 2³ = 8 種</text:p>
            <text:p text:style-name="P38"/>
            <text:p text:style-name="P36">★ 圖片原文：「共8種可能（deg-1節可貼左子或右子）」</text:p>
          </table:table-cell>
        </table:table-row>
      </table:table>
      <text:p text:style-name="P11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44">115高考 Q2 — Complete Binary Tree 定義+證明</text:p>
          </table:table-cell>
        </table:table-row>
        <table:table-row table:style-name="表格50.1">
          <table:table-cell table:style-name="表格50.A2" office:value-type="string">
            <text:p text:style-name="P36">題目：證明 Complete Binary Tree 節點數 n 滿足 2^(h-1) ≤ n ≤ 2^h − 1</text:p>
            <text:p text:style-name="P38"/>
            <text:p text:style-name="P36">前 h-1 層全滿：節點數 = 2^(h-1) − 1</text:p>
            <text:p text:style-name="P36">下界：最後層至少 1 個 → n ≥ 2^(h-1) − 1 + 1 = 2^(h-1) <text:s/>✔</text:p>
            <text:p text:style-name="P36">上界：最後層全滿 → n ≤ 2^(h-1) − 1 + 2^(h-1) = 2^h − 1 <text:s/>✔</text:p>
            <text:p text:style-name="P36">→ 得證 2^(h-1) ≤ n ≤ 2^h − 1 <text:s/>(整理)</text:p>
          </table:table-cell>
        </table:table-row>
      </table:table>
      <text:p text:style-name="P11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44">113高考 Q4 — 一維陣列存二元樹</text:p>
          </table:table-cell>
        </table:table-row>
        <table:table-row table:style-name="表格51.1">
          <table:table-cell table:style-name="表格51.A2" office:value-type="string">
            <text:p text:style-name="P36">題目：用 1D 陣列存樹，root=a[1], left=a[2i], right=a[2i+1]</text:p>
            <text:p text:style-name="P36"><text:s text:c="6"/>引申：1024 的節點 parent=？ <text:s/>right=？</text:p>
            <text:p text:style-name="P38"/>
            <text:p text:style-name="P36">計算：</text:p>
            <text:p text:style-name="P36">• parent(1024) = ⌊1024/2⌋ = 512</text:p>
            <text:p text:style-name="P38"><text:soft-page-break/><text:span text:style-name="T2">• right(1024) <text:s/>= 2×1024+1 <text:s/>= 2049</text:span></text:p>
            <text:p text:style-name="P38"/>
            <text:p text:style-name="P36">★ 偏斜樹（Skewed Tree）：所有節點只有右 child（或只有左 child）</text:p>
            <text:p text:style-name="P36"><text:s text:c="3"/>→ 空間利用率最低，高度 h 只存 h 個節點，但陣列要 2^h−1 格</text:p>
          </table:table-cell>
        </table:table-row>
      </table:table>
      <text:p text:style-name="Standard"/>
      <text:h text:style-name="P24" text:outline-level="1">第十章：公職考試必考重點總整理</text:h>
      <text:h text:style-name="P3" text:outline-level="2">10.1 必背公式清單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7">公式</text:p>
          </table:table-cell>
          <table:table-cell table:style-name="表格52.A1" office:value-type="string">
            <text:p text:style-name="P17">數學式</text:p>
          </table:table-cell>
          <table:table-cell table:style-name="表格52.A1" office:value-type="string">
            <text:p text:style-name="P17">記憶口訣</text:p>
          </table:table-cell>
        </table:table-row>
        <table:table-row table:style-name="表格52.1">
          <table:table-cell table:style-name="表格52.A2" office:value-type="string">
            <text:p text:style-name="P34">分支數</text:p>
          </table:table-cell>
          <table:table-cell table:style-name="表格52.B2" office:value-type="string">
            <text:p text:style-name="P32">n − 1</text:p>
          </table:table-cell>
          <table:table-cell table:style-name="表格52.C2" office:value-type="string">
            <text:p text:style-name="P34">n個節點n-1條線</text:p>
          </table:table-cell>
        </table:table-row>
        <table:table-row table:style-name="表格52.1">
          <table:table-cell table:style-name="表格52.A3" office:value-type="string">
            <text:p text:style-name="P34">葉節點數</text:p>
          </table:table-cell>
          <table:table-cell table:style-name="表格52.B2" office:value-type="string">
            <text:p text:style-name="P32">n0 = n2 + 1</text:p>
          </table:table-cell>
          <table:table-cell table:style-name="表格52.C3" office:value-type="string">
            <text:p text:style-name="P34">葉比度2多一個</text:p>
          </table:table-cell>
        </table:table-row>
        <table:table-row table:style-name="表格52.1">
          <table:table-cell table:style-name="表格52.A4" office:value-type="string">
            <text:p text:style-name="P34">滿二元樹節點</text:p>
          </table:table-cell>
          <table:table-cell table:style-name="表格52.B2" office:value-type="string">
            <text:p text:style-name="P32">2^h − 1</text:p>
          </table:table-cell>
          <table:table-cell table:style-name="表格52.C4" office:value-type="string">
            <text:p text:style-name="P34">等比級數求和</text:p>
          </table:table-cell>
        </table:table-row>
        <table:table-row table:style-name="表格52.1">
          <table:table-cell table:style-name="表格52.A5" office:value-type="string">
            <text:p text:style-name="P34">CBT節點範圍</text:p>
          </table:table-cell>
          <table:table-cell table:style-name="表格52.B2" office:value-type="string">
            <text:p text:style-name="P32">2^(h−1) ≤ n ≤ 2^h−1</text:p>
          </table:table-cell>
          <table:table-cell table:style-name="表格52.C5" office:value-type="string">
            <text:p text:style-name="P34">夾住中間</text:p>
          </table:table-cell>
        </table:table-row>
        <table:table-row table:style-name="表格52.1">
          <table:table-cell table:style-name="表格52.A6" office:value-type="string">
            <text:p text:style-name="P34">陣列左子</text:p>
          </table:table-cell>
          <table:table-cell table:style-name="表格52.B2" office:value-type="string">
            <text:p text:style-name="P32">a[2i]</text:p>
          </table:table-cell>
          <table:table-cell table:style-name="表格52.C6" office:value-type="string">
            <text:p text:style-name="P34">乘2</text:p>
          </table:table-cell>
        </table:table-row>
        <table:table-row table:style-name="表格52.1">
          <table:table-cell table:style-name="表格52.A7" office:value-type="string">
            <text:p text:style-name="P34">陣列右子</text:p>
          </table:table-cell>
          <table:table-cell table:style-name="表格52.B2" office:value-type="string">
            <text:p text:style-name="P32">a[2i+1]</text:p>
          </table:table-cell>
          <table:table-cell table:style-name="表格52.C7" office:value-type="string">
            <text:p text:style-name="P34">乘2加1</text:p>
          </table:table-cell>
        </table:table-row>
        <table:table-row table:style-name="表格52.1">
          <table:table-cell table:style-name="表格52.A8" office:value-type="string">
            <text:p text:style-name="P34">陣列父節點</text:p>
          </table:table-cell>
          <table:table-cell table:style-name="表格52.B2" office:value-type="string">
            <text:p text:style-name="P32">a[⌊i/2⌋]</text:p>
          </table:table-cell>
          <table:table-cell table:style-name="表格52.C8" office:value-type="string">
            <text:p text:style-name="P34">除2取整</text:p>
          </table:table-cell>
        </table:table-row>
        <table:table-row table:style-name="表格52.1">
          <table:table-cell table:style-name="表格52.A9" office:value-type="string">
            <text:p text:style-name="P34">BST Inorder</text:p>
          </table:table-cell>
          <table:table-cell table:style-name="表格52.B2" office:value-type="string">
            <text:p text:style-name="P32">遞增排序</text:p>
          </table:table-cell>
          <table:table-cell table:style-name="表格52.C9" office:value-type="string">
            <text:p text:style-name="P34">中序有序</text:p>
          </table:table-cell>
        </table:table-row>
      </table:table>
      <text:p text:style-name="P11"/>
      <text:h text:style-name="P3" text:outline-level="2">10.2 考試題型速查</text:h>
      <text:list text:continue-numbering="true" text:style-name="WWNum3">
        <text:list-item>
          <text:p text:style-name="P131">Traversal（走訪）：給樹求前/中/後序 → 記住「根的位置」</text:p>
        </text:list-item>
        <text:list-item>
          <text:p text:style-name="P131">重建樹：給前序+中序 → 前序第一個是根，中序切左右</text:p>
        </text:list-item>
        <text:list-item>
          <text:p text:style-name="P131">前序+後序不唯一 → degree-1 節點每個有2種可能 → 2^k 種</text:p>
        </text:list-item>
        <text:list-item>
          <text:p text:style-name="P131">BST 插入刪除 → 刪除兩個子節點最難，找右子樹最小值補位</text:p>
        </text:list-item>
        <text:list-item>
          <text:p text:style-name="P131">Complete Binary Tree 判斷 → 最後一層要靠左</text:p>
        </text:list-item>
        <text:list-item>
          <text:p text:style-name="P131">陣列表示法 → parent=i/2, left=2i, right=2i+1</text:p>
        </text:list-item>
        <text:list-item>
          <text:p text:style-name="P131">Heap Sort → 建 Max Heap → 依序取出 root → O(n log n)</text:p>
        </text:list-item>
        <text:list-item>
          <text:p text:style-name="P131">偏斜樹 → 最浪費空間，等同 Linked List</text:p>
        </text:list-item>
      </text:list>
      <text:p text:style-name="P11"/>
      <text:h text:style-name="P3" text:outline-level="2">10.3 原始考試筆記錯誤說明（ChatGPT 回答的問題）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52">✅ ChatGPT 的大部分說明都正確，以下補充被省略的細節：</text:p>
            <text:p text:style-name="P38"/>
            <text:p text:style-name="P52">1. n0 = n2 + 1 的公式推導 → ChatGPT 有說到 n0,n2 但沒有完整推導</text:p>
            <text:p text:style-name="P52">2. 前序+後序不唯一的精確說法：有 k 個 degree-1 節點 → 2^k 種可能</text:p>
            <text:p text:style-name="P52"><text:s text:c="3"/>（不是「通常不行」，是「有多少個 degree-1 就有多少倍的不確定性」）</text:p>
            <text:p text:style-name="P52">3. 偏斜樹（Skewed Tree）的概念 → ChatGPT 後期有提到但說明較少</text:p>
            <text:p text:style-name="P52">4. 114 Q1 的 8 種可能 → 來自 3 個 degree-1 節點各有 2 選擇（2^3=8）</text:p>
            <text:p text:style-name="P52">5. Complete Binary Tree 公式推導（115 Q2）→ 上下界各需分開說明</text:p>
            <text:p text:style-name="P52">6. 樹高定義有兩種（從 0 or 1 開始）→ 考試務必注意題目</text:p>
          </table:table-cell>
        </table:table-row>
      </table:table>
      <text:p text:style-name="Standard"/>
      <text:h text:style-name="P24" text:outline-level="1">第十一章：一頁快速複習表（考前衝刺）</text:h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13">◆ Binary Tree：每節點最多 2 個 child</text:p>
            <text:p text:style-name="P13">◆ 分支 = n−1 | 葉(n0) = 度2節點(n2) + 1</text:p>
            <text:p text:style-name="P13">◆ Preorder:根左右 | Inorder:左根右 | Postorder:左右根</text:p>
            <text:p text:style-name="P13">◆ BST Inorder = 遞增排序</text:p>
            <text:p text:style-name="P13">◆ 前序+中序 → 唯一重建 ✅ | 後序+中序 → 唯一重建 ✅</text:p>
            <text:p text:style-name="P13">◆ 前序+後序 → 不唯一（有 k 個 degree-1 節點 → 2^k 種）</text:p>
            <text:p text:style-name="P13">◆ Complete BT：最後層靠左 | Full BT：每節點 0 or 2 個 child</text:p>
            <text:p text:style-name="P13">◆ 2^(h−1) ≤ n ≤ 2^h−1（Complete BT 節點範圍）</text:p>
            <text:p text:style-name="P13">◆ Heap = CBT + 父子大小規則 | Max Heap root = 最大值</text:p>
            <text:p text:style-name="P13">◆ Heap ≠ BST（Heap 左右不保證大小順序）</text:p>
            <text:p text:style-name="P13">◆ 陣列：left=a[2i], right=a[2i+1], parent=a[⌊i/2⌋]</text:p>
            <text:p text:style-name="P13">◆ 偏斜樹 = 最浪費空間</text:p>
            <text:p text:style-name="P13">◆ BFS 用 Queue | DFS 用 Stack / 遞迴</text:p>
          </table:table-cell>
        </table:table-row>
      </table:table>
      <text:p text:style-name="P11"/>
      <text:p text:style-name="P11"/>
      <text:p text:style-name="P37">— End of Notes 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1f4e79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23cm" fo:margin-bottom="0.212cm" style:contextual-spacing="false"/>
      <style:text-properties fo:color="#2e75b6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494cm" fo:margin-left="1.976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141cm" fo:border-left="none" fo:border-right="none" fo:border-top="none" fo:border-bottom="0.51pt solid #2e75b6"/>
      <style:text-properties fo:color="#2e75b6" loext:opacity="100%" style:font-name="Arial" fo:font-size="9pt" style:font-name-asian="Arial3" style:font-size-asian="9pt" style:font-name-complex="Arial3" style:font-size-complex="9pt"/>
    </style:style>
    <style:style style:name="MP2" style:family="paragraph" style:parent-style-name="Standard">
      <style:paragraph-properties fo:text-align="center" style:justify-single-word="false" fo:padding-left="0cm" fo:padding-right="0cm" fo:padding-top="0.141cm" fo:padding-bottom="0cm" fo:border-left="none" fo:border-right="none" fo:border-top="0.51pt solid #2e75b6" fo:border-bottom="none"/>
    </style:style>
    <style:style style:name="MT1" style:family="text">
      <style:text-properties fo:color="#595959" loext:opacity="100%" style:font-name="Arial" fo:font-size="9pt" style:font-name-asian="Arial3" style:font-size-asian="9pt" style:font-name-complex="Arial3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二元樹（Binary Tree）完整學習筆記</text:p>
      </style:header>
      <style:footer>
        <text:p text:style-name="MP2"><text:span text:style-name="MT1">第 </text:span><text:page-number text:select-page="current">35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32</meta:editing-cycles>
    <meta:creation-date>2026-05-28T00:04:25.669000000</meta:creation-date>
    <dc:date>2026-05-29T16:55:21.323000000</dc:date>
    <meta:generator>MODA_ODF_Application_Tools/3.8.4.2$Windows_X86_64 LibreOffice_project/4fb77107d5af14329e08085efe4fa19b5633383a</meta:generator>
    <meta:editing-duration>PT19H28M43S</meta:editing-duration>
    <meta:document-statistic meta:table-count="124" meta:image-count="0" meta:object-count="0" meta:page-count="35" meta:paragraph-count="1076" meta:word-count="11030" meta:character-count="21321" meta:non-whitespace-character-count="15291"/>
  </office:meta>
</office:document-meta>
</file>