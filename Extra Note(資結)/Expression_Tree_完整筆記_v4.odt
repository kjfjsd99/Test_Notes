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4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3" style:family="table">
      <style:table-properties style:width="16.51cm" fo:margin-left="0.004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25pt solid #cccccc">
        <style:background-image/>
      </style:table-cell-properties>
    </style:style>
    <style:style style:name="表格4" style:family="table">
      <style:table-properties style:width="16.51cm" fo:margin-left="0.004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5" style:family="table">
      <style:table-properties style:width="16.51cm" fo:margin-left="0.004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6" style:family="table">
      <style:table-properties style:width="16.51cm" fo:margin-left="0.004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7" style:family="table">
      <style:table-properties style:width="16.51cm" fo:margin-left="0.004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8" style:family="table">
      <style:table-properties style:width="16.51cm" fo:margin-left="0.004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9" style:family="table">
      <style:table-properties style:width="16.51cm" fo:margin-left="0.004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0" style:family="table">
      <style:table-properties style:width="16.51cm" fo:margin-left="0.004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25pt solid #1e5631">
        <style:background-image/>
      </style:table-cell-properties>
    </style:style>
    <style:style style:name="表格11" style:family="table">
      <style:table-properties style:width="16.51cm" fo:margin-left="0.004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2" style:family="table">
      <style:table-properties style:width="16.51cm" fo:margin-left="0.004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4cm"/>
    </style:style>
    <style:style style:name="表格12.D" style:family="table-column">
      <style:table-column-properties style:column-width="3.53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25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3" style:family="table">
      <style:table-properties style:width="16.51cm" fo:margin-left="0.004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4cm"/>
    </style:style>
    <style:style style:name="表格13.D" style:family="table-column">
      <style:table-column-properties style:column-width="3.53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25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4" style:family="table">
      <style:table-properties style:width="16.51cm" fo:margin-left="0.004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25pt solid #7b3f00">
        <style:background-image/>
      </style:table-cell-properties>
    </style:style>
    <style:style style:name="表格15" style:family="table">
      <style:table-properties style:width="16.51cm" fo:margin-left="0.004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6" style:family="table">
      <style:table-properties style:width="16.51cm" fo:margin-left="0.004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17" style:family="table">
      <style:table-properties style:width="16.51cm" fo:margin-left="0.004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8" style:family="table">
      <style:table-properties style:width="9.525cm" fo:margin-left="0.004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9" style:family="table">
      <style:table-properties style:width="16.51cm" fo:margin-left="0.004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0" style:family="table">
      <style:table-properties style:width="16.51cm" fo:margin-left="0.004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1" style:family="table">
      <style:table-properties style:width="16.51cm" fo:margin-left="0.004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2" style:family="table">
      <style:table-properties style:width="16.51cm" fo:margin-left="0.004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3" style:family="table">
      <style:table-properties style:width="16.51cm" fo:margin-left="0.004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4" style:family="table">
      <style:table-properties style:width="16.51cm" fo:margin-left="0.004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5" style:family="table">
      <style:table-properties style:width="16.51cm" fo:margin-left="0.004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26" style:family="table">
      <style:table-properties style:width="16.51cm" fo:margin-left="0.004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7" style:family="table">
      <style:table-properties style:width="16.51cm" fo:margin-left="0.004cm" fo:margin-top="0cm" fo:margin-bottom="0cm" table:align="left" style:writing-mode="page"/>
    </style:style>
    <style:style style:name="表格27.A" style:family="table-column">
      <style:table-column-properties style:column-width="3.171cm"/>
    </style:style>
    <style:style style:name="表格27.B" style:family="table-column">
      <style:table-column-properties style:column-width="7.689cm"/>
    </style:style>
    <style:style style:name="表格27.C" style:family="table-column">
      <style:table-column-properties style:column-width="5.65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25pt solid #cccccc">
        <style:background-image/>
      </style:table-cell-properties>
    </style:style>
    <style:style style:name="表格28" style:family="table">
      <style:table-properties style:width="16.51cm" fo:margin-left="0.004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9" style:family="table">
      <style:table-properties style:width="16.51cm" fo:margin-left="0.004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2cm"/>
    </style:style>
    <style:style style:name="表格29.C" style:family="table-column">
      <style:table-column-properties style:column-width="8.823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30" style:family="table">
      <style:table-properties style:width="16.51cm" fo:margin-left="0.004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31" style:family="table">
      <style:table-properties style:width="16.51cm" fo:margin-left="0.004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32" style:family="table">
      <style:table-properties style:width="16.51cm" fo:margin-left="0.004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P1" style:family="paragraph" style:parent-style-name="Standard">
      <style:paragraph-properties fo:margin-top="0.353cm" fo:margin-bottom="0cm" style:contextual-spacing="false"/>
    </style:style>
    <style:style style:name="P2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3" style:family="paragraph" style:parent-style-name="Standard">
      <style:paragraph-properties fo:margin-top="0.106cm" fo:margin-bottom="0cm" style:contextual-spacing="false"/>
    </style:style>
    <style:style style:name="P4" style:family="paragraph" style:parent-style-name="Standard">
      <style:paragraph-properties fo:margin-top="0.071cm" fo:margin-bottom="0.071cm" style:contextual-spacing="false"/>
    </style:style>
    <style:style style:name="P5" style:family="paragraph" style:parent-style-name="Standard">
      <style:paragraph-properties fo:margin-top="0.035cm" fo:margin-bottom="0.035cm" style:contextual-spacing="false"/>
    </style:style>
    <style:style style:name="P6" style:family="paragraph" style:parent-style-name="Standard">
      <style:paragraph-properties fo:margin-top="0.212cm" fo:margin-bottom="0cm" style:contextual-spacing="false"/>
    </style:style>
    <style:style style:name="P7" style:family="paragraph" style:parent-style-name="Standard">
      <style:paragraph-properties fo:margin-top="0.071cm" fo:margin-bottom="0.035cm" style:contextual-spacing="false"/>
    </style:style>
    <style:style style:name="P8" style:family="paragraph" style:parent-style-name="Standard">
      <style:paragraph-properties fo:margin-top="0.141cm" fo:margin-bottom="0cm" style:contextual-spacing="false"/>
    </style:style>
    <style:style style:name="P9" style:family="paragraph" style:parent-style-name="Standard">
      <style:paragraph-properties fo:margin-top="0.035cm" fo:margin-bottom="0.071cm" style:contextual-spacing="false"/>
    </style:style>
    <style:style style:name="P10" style:family="paragraph" style:parent-style-name="Standard">
      <style:paragraph-properties fo:margin-top="0.176cm" fo:margin-bottom="0cm" style:contextual-spacing="false"/>
    </style:style>
    <style:style style:name="P11" style:family="paragraph" style:parent-style-name="Standard">
      <style:paragraph-properties fo:margin-top="0.071cm" fo:margin-bottom="0cm" style:contextual-spacing="false"/>
    </style:style>
    <style:style style:name="P12" style:family="paragraph" style:parent-style-name="Heading_20_2">
      <style:paragraph-properties fo:margin-left="0cm" fo:margin-right="0cm" fo:margin-top="0.494cm" fo:margin-bottom="0.176cm" style:contextual-spacing="false" fo:text-indent="0cm" style:auto-text-indent="false"/>
    </style:style>
    <style:style style:name="P13" style:family="paragraph" style:parent-style-name="Heading_20_1">
      <style:paragraph-properties fo:margin-left="0cm" fo:margin-right="0cm" fo:margin-top="0.635cm" fo:margin-bottom="0.212cm" style:contextual-spacing="false" fo:text-indent="0cm" style:auto-text-indent="false"/>
    </style:style>
    <style:style style:name="P14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15" style:family="paragraph" style:parent-style-name="Heading_20_1">
      <style:paragraph-properties fo:margin-left="0cm" fo:margin-right="0cm" fo:margin-top="0cm" fo:margin-bottom="0.212cm" style:contextual-spacing="false" fo:text-indent="0cm" style:auto-text-indent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top="0.141cm" fo:margin-bottom="0cm" style:contextual-spacing="false" fo:text-align="center" style:justify-single-word="false"/>
    </style:style>
    <style:style style:name="P18" style:family="paragraph" style:parent-style-name="Standard">
      <style:paragraph-properties fo:margin-top="0.106cm" fo:margin-bottom="0.035cm" style:contextual-spacing="false" fo:text-align="center" style:justify-single-word="false"/>
    </style:style>
    <style:style style:name="P19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20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1" style:family="paragraph" style:parent-style-name="Standard">
      <style:paragraph-properties fo:margin-top="0.141cm" fo:margin-bottom="0.141cm" style:contextual-spacing="false" fo:text-align="center" style:justify-single-word="false"/>
    </style:style>
    <style:style style:name="P22" style:family="paragraph" style:parent-style-name="Standard">
      <style:paragraph-properties fo:margin-top="0.071cm" fo:margin-bottom="0.018cm" style:contextual-spacing="false" fo:text-align="center" style:justify-single-word="false"/>
    </style:style>
    <style:style style:name="P23" style:family="paragraph" style:parent-style-name="Standard">
      <style:paragraph-properties fo:margin-top="0.053cm" fo:margin-bottom="0.053cm" style:contextual-spacing="false" fo:text-align="center" style:justify-single-word="false"/>
    </style:style>
    <style:style style:name="P24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25" style:family="paragraph" style:parent-style-name="Standard">
      <style:paragraph-properties fo:margin-top="0.106cm" fo:margin-bottom="0.106cm" style:contextual-spacing="false"/>
    </style:style>
    <style:style style:name="P26" style:family="paragraph" style:parent-style-name="Standard">
      <style:paragraph-properties fo:margin-top="0.071cm" fo:margin-bottom="0.071cm" style:contextual-spacing="false"/>
    </style:style>
    <style:style style:name="P27" style:family="paragraph" style:parent-style-name="Standard">
      <style:paragraph-properties fo:margin-top="0.035cm" fo:margin-bottom="0.035cm" style:contextual-spacing="false"/>
    </style:style>
    <style:style style:name="P28" style:family="paragraph" style:parent-style-name="Standard">
      <style:paragraph-properties fo:margin-top="0.071cm" fo:margin-bottom="0.035cm" style:contextual-spacing="false"/>
    </style:style>
    <style:style style:name="P29" style:family="paragraph" style:parent-style-name="Standard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P30" style:family="paragraph" style:parent-style-name="Standard">
      <style:paragraph-properties fo:margin-top="0.035cm" fo:margin-bottom="0.071cm" style:contextual-spacing="false"/>
    </style:style>
    <style:style style:name="P31" style:family="paragraph" style:parent-style-name="Standard">
      <style:paragraph-properties fo:margin-top="0cm" fo:margin-bottom="0.035cm" style:contextual-spacing="false"/>
    </style:style>
    <style:style style:name="P32" style:family="paragraph" style:parent-style-name="Standard">
      <style:paragraph-properties fo:margin-top="0.353cm" fo:margin-bottom="0.141cm" style:contextual-spacing="false"/>
    </style:style>
    <style:style style:name="P33" style:family="paragraph" style:parent-style-name="Standard">
      <style:paragraph-properties fo:margin-top="0.071cm" fo:margin-bottom="0.018cm" style:contextual-spacing="false"/>
    </style:style>
    <style:style style:name="P34" style:family="paragraph" style:parent-style-name="Standard">
      <style:paragraph-properties fo:margin-top="0cm" fo:margin-bottom="0.018cm" style:contextual-spacing="false"/>
    </style:style>
    <style:style style:name="P35" style:family="paragraph" style:parent-style-name="Standard">
      <style:paragraph-properties fo:margin-top="0cm" fo:margin-bottom="0.106cm" style:contextual-spacing="false"/>
    </style:style>
    <style:style style:name="P36" style:family="paragraph" style:parent-style-name="Standard">
      <style:paragraph-properties fo:margin-top="0.018cm" fo:margin-bottom="0.018cm" style:contextual-spacing="false"/>
    </style:style>
    <style:style style:name="P37" style:family="paragraph" style:parent-style-name="Standard">
      <style:paragraph-properties fo:margin-top="0.018cm" fo:margin-bottom="0.071cm" style:contextual-spacing="false"/>
    </style:style>
    <style:style style:name="P38" style:family="paragraph" style:parent-style-name="Standard">
      <style:paragraph-properties fo:margin-top="0.018cm" fo:margin-bottom="0.035cm" style:contextual-spacing="false"/>
    </style:style>
    <style:style style:name="P39" style:family="paragraph" style:parent-style-name="Standard">
      <style:paragraph-properties fo:margin-top="0.035cm" fo:margin-bottom="0.018cm" style:contextual-spacing="false"/>
    </style:style>
    <style:style style:name="P40" style:family="paragraph" style:parent-style-name="Standard">
      <style:text-properties fo:color="#1a6b72" loext:opacity="100%" style:font-name="Arial" fo:font-size="13pt" fo:font-weight="bold" style:font-name-asian="Arial2" style:font-size-asian="13pt" style:font-weight-asian="bold"/>
    </style:style>
    <style:style style:name="P41" style:family="paragraph" style:parent-style-name="Standard">
      <style:text-properties fo:color="#444444" loext:opacity="100%" style:font-name="Arial" fo:font-size="11pt" style:font-name-asian="Arial2" style:font-size-asian="11pt"/>
    </style:style>
    <style:style style:name="P42" style:family="paragraph" style:parent-style-name="Standard">
      <style:paragraph-properties fo:margin-left="0.762cm" fo:margin-right="0cm" fo:text-indent="0cm" style:auto-text-indent="false"/>
      <style:text-properties fo:color="#444444" loext:opacity="100%" style:font-name="Arial" fo:font-size="11pt" style:font-name-asian="Arial2" style:font-size-asian="11pt"/>
    </style:style>
    <style:style style:name="P43" style:family="paragraph" style:parent-style-name="Standard">
      <style:text-properties fo:color="#444444" loext:opacity="100%" style:font-name="Arial" fo:font-size="11pt" fo:font-style="italic" style:font-name-asian="Arial2" style:font-size-asian="11pt" style:font-style-asian="italic"/>
    </style:style>
    <style:style style:name="P44" style:family="paragraph" style:parent-style-name="Standard">
      <style:text-properties fo:color="#444444" loext:opacity="100%" style:font-name="Arial" fo:font-size="11pt" fo:font-weight="bold" style:font-name-asian="Arial2" style:font-size-asian="11pt" style:font-weight-asian="bold"/>
    </style:style>
    <style:style style:name="P45" style:family="paragraph" style:parent-style-name="Standard">
      <style:text-properties fo:color="#1f3864" loext:opacity="100%" style:font-name="Arial" fo:font-size="11pt" fo:font-weight="bold" style:font-name-asian="Arial2" style:font-size-asian="11pt" style:font-weight-asian="bold"/>
    </style:style>
    <style:style style:name="P46" style:family="paragraph" style:parent-style-name="Standard">
      <style:text-properties fo:color="#1f3864" loext:opacity="100%" style:font-name="Arial" fo:font-size="12pt" fo:font-weight="bold" style:font-name-asian="Arial2" style:font-size-asian="12pt" style:font-weight-asian="bold"/>
    </style:style>
    <style:style style:name="P47" style:family="paragraph" style:parent-style-name="Standard">
      <style:paragraph-properties fo:margin-left="0.762cm" fo:margin-right="0cm" fo:text-indent="0cm" style:auto-text-indent="false"/>
      <style:text-properties fo:color="#1f3864" loext:opacity="100%" style:font-name="Courier New" fo:font-size="11pt" fo:font-weight="bold" style:font-name-asian="Courier New1" style:font-size-asian="11pt" style:font-weight-asian="bold"/>
    </style:style>
    <style:style style:name="P48" style:family="paragraph" style:parent-style-name="Standard">
      <style:paragraph-properties fo:margin-left="0.762cm" fo:margin-right="0cm" fo:text-indent="0cm" style:auto-text-indent="false"/>
      <style:text-properties fo:color="#1f3864" loext:opacity="100%" style:font-name="Courier New" fo:font-size="10pt" style:font-name-asian="Courier New1" style:font-size-asian="10pt"/>
    </style:style>
    <style:style style:name="P49" style:family="paragraph" style:parent-style-name="Standard">
      <style:text-properties fo:color="#1f3864" loext:opacity="100%" style:font-name="Courier New" fo:font-size="10pt" style:font-name-asian="Courier New1" style:font-size-asian="10pt"/>
    </style:style>
    <style:style style:name="P50" style:family="paragraph" style:parent-style-name="Standard">
      <style:text-properties fo:color="#1f3864" loext:opacity="100%" style:font-name="Courier New" fo:font-size="10pt" officeooo:paragraph-rsid="000ef5ea" style:font-name-asian="Courier New1" style:font-size-asian="10pt"/>
    </style:style>
    <style:style style:name="P51" style:family="paragraph" style:parent-style-name="Standard">
      <style:text-properties fo:color="#ff7f00" loext:opacity="100%" style:font-name="Arial" fo:font-size="13pt" fo:font-weight="bold" style:font-name-asian="Arial2" style:font-size-asian="13pt" style:font-weight-asian="bold"/>
    </style:style>
    <style:style style:name="P52" style:family="paragraph" style:parent-style-name="Standard">
      <style:paragraph-properties fo:margin-left="0.762cm" fo:margin-right="0cm" fo:text-indent="0cm" style:auto-text-indent="false"/>
      <style:text-properties fo:color="#22b14c" loext:opacity="100%" style:font-name="Courier New" fo:font-size="10pt" fo:font-weight="bold" style:font-name-asian="Courier New1" style:font-size-asian="10pt" style:font-weight-asian="bold"/>
    </style:style>
    <style:style style:name="P53" style:family="paragraph" style:parent-style-name="Standard">
      <style:text-properties fo:color="#22b14c" loext:opacity="100%" style:font-name="Courier New" fo:font-size="10pt" fo:font-weight="bold" style:font-name-asian="Courier New1" style:font-size-asian="10pt" style:font-weight-asian="bold"/>
    </style:style>
    <style:style style:name="P54" style:family="paragraph" style:parent-style-name="Standard">
      <style:text-properties fo:color="#22b14c" loext:opacity="100%" style:font-name="Arial" fo:font-size="11pt" fo:font-weight="bold" style:font-name-asian="Arial2" style:font-size-asian="11pt" style:font-weight-asian="bold"/>
    </style:style>
    <style:style style:name="P55" style:family="paragraph" style:parent-style-name="Standard">
      <style:paragraph-properties fo:margin-left="0.762cm" fo:margin-right="0cm" fo:text-indent="0cm" style:auto-text-indent="false"/>
      <style:text-properties fo:color="#22b14c" loext:opacity="100%" style:font-name="Arial" fo:font-size="12pt" fo:font-weight="bold" style:font-name-asian="Arial2" style:font-size-asian="12pt" style:font-weight-asian="bold"/>
    </style:style>
    <style:style style:name="P56" style:family="paragraph" style:parent-style-name="Standard">
      <style:text-properties fo:color="#22b14c" loext:opacity="100%" style:font-name="Arial" fo:font-size="12pt" fo:font-weight="bold" style:font-name-asian="Arial2" style:font-size-asian="12pt" style:font-weight-asian="bold"/>
    </style:style>
    <style:style style:name="P57" style:family="paragraph" style:parent-style-name="Standard">
      <style:text-properties fo:color="#c00000" loext:opacity="100%" style:font-name="Arial" fo:font-size="11pt" style:font-name-asian="Arial2" style:font-size-asian="11pt"/>
    </style:style>
    <style:style style:name="P58" style:family="paragraph" style:parent-style-name="Standard">
      <style:paragraph-properties fo:margin-top="0.106cm" fo:margin-bottom="0.035cm" style:contextual-spacing="false"/>
    </style:style>
    <style:style style:name="P59" style:family="paragraph" style:parent-style-name="Standard">
      <style:paragraph-properties fo:margin-top="0cm" fo:margin-bottom="0.071cm" style:contextual-spacing="false"/>
    </style:style>
    <style:style style:name="P60" style:family="paragraph" style:parent-style-name="Standard">
      <style:text-properties officeooo:paragraph-rsid="000ef5ea"/>
    </style:style>
    <style:style style:name="T1" style:family="text">
      <style:text-properties fo:color="#ffffff" loext:opacity="100%" style:font-name="Arial" fo:font-size="24pt" fo:font-weight="bold" style:font-size-asian="24pt" style:font-weight-asian="bold" style:font-name-complex="Arial2" style:font-size-complex="24pt" style:font-weight-complex="bold"/>
    </style:style>
    <style:style style:name="T2" style:family="text">
      <style:text-properties fo:color="#ffffff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" style:family="text">
      <style:text-properties fo:color="#ffffff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6" style:family="text"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7" style:family="text">
      <style:text-properties fo:color="#ffffff" loext:opacity="100%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8" style:family="text">
      <style:text-properties fo:color="#ffffff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9" style:family="text">
      <style:text-properties fo:color="#a8d8dc" loext:opacity="100%" style:font-name="Arial" fo:font-size="12pt" style:font-size-asian="12pt" style:font-name-complex="Arial2" style:font-size-complex="12pt"/>
    </style:style>
    <style:style style:name="T10" style:family="text">
      <style:text-properties fo:color="#a8d8dc" loext:opacity="100%" style:font-name="Arial" fo:font-size="12pt" style:font-name-asian="Arial2" style:font-size-asian="12pt" style:font-name-complex="Arial2" style:font-size-complex="12pt"/>
    </style:style>
    <style:style style:name="T11" style:family="text">
      <style:text-properties fo:color="#a8d8dc" loext:opacity="100%" fo:font-size="12pt" style:font-name-asian="Arial2" style:font-size-asian="12pt" style:font-name-complex="Arial2" style:font-size-complex="12pt"/>
    </style:style>
    <style:style style:name="T12" style:family="text">
      <style:text-properties fo:color="#1f3864" loext:opacity="100%" style:font-name="Arial" fo:font-size="18pt" fo:font-weight="bold" style:font-size-asian="18pt" style:font-weight-asian="bold" style:font-name-complex="Arial2" style:font-size-complex="18pt" style:font-weight-complex="bold"/>
    </style:style>
    <style:style style:name="T13" style:family="text">
      <style:text-properties fo:color="#1f3864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14" style:family="text">
      <style:text-properties fo:color="#1f3864" loext:opacity="100%" style:font-name="Arial" fo:font-size="18pt" fo:font-weight="bold" fo:background-color="#ffd740" loext:char-shading-value="0" style:font-name-asian="Arial2" style:font-size-asian="18pt" style:font-weight-asian="bold" style:font-name-complex="Arial2" style:font-size-complex="18pt" style:font-weight-complex="bold"/>
    </style:style>
    <style:style style:name="T15" style:family="text">
      <style:text-properties fo:color="#1f3864" loext:opacity="100%" style:font-name="Arial" fo:font-size="18pt" fo:font-weight="bold" fo:background-color="#ffd740" loext:char-shading-value="0" style:font-size-asian="18pt" style:font-weight-asian="bold" style:font-name-complex="Arial2" style:font-size-complex="18pt" style:font-weight-complex="bold"/>
    </style:style>
    <style:style style:name="T16" style:family="text">
      <style:text-properties fo:color="#1f3864" loext:opacity="100%" style:font-name="Arial" fo:font-size="18pt" fo:font-weight="bold" fo:background-color="#ffab40" loext:char-shading-value="0" style:font-size-asian="18pt" style:font-weight-asian="bold" style:font-name-complex="Arial2" style:font-size-complex="18pt" style:font-weight-complex="bold"/>
    </style:style>
    <style:style style:name="T17" style:family="text">
      <style:text-properties fo:color="#1f3864" loext:opacity="100%" style:font-name="Arial" fo:font-size="18pt" fo:font-weight="bold" fo:background-color="#ffab40" loext:char-shading-value="0" style:font-name-asian="Arial2" style:font-size-asian="18pt" style:font-weight-asian="bold" style:font-name-complex="Arial2" style:font-size-complex="18pt" style:font-weight-complex="bold"/>
    </style:style>
    <style:style style:name="T18" style:family="text">
      <style:text-properties fo:color="#1f3864" loext:opacity="100%" style:font-name="Arial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0" style:family="text">
      <style:text-properties fo:color="#1f3864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21" style:family="text"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2" style:family="text">
      <style:text-properties fo:color="#1f38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3" style:family="text">
      <style:text-properties fo:color="#1f3864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24" style:family="text"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25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26" style:family="text">
      <style:text-properties fo:color="#1f3864" loext:opacity="100%" style:font-name="Courier New" fo:font-size="10pt" style:font-name-asian="Courier New1" style:font-size-asian="10pt"/>
    </style:style>
    <style:style style:name="T27" style:family="text"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T28" style:family="text"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T29" style:family="text">
      <style:text-properties fo:color="#1f3864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0" style:family="text">
      <style:text-properties fo:color="#1a6b72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T31" style:family="text">
      <style:text-properties fo:color="#1a6b72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32" style:family="text">
      <style:text-properties fo:color="#1a6b72" loext:opacity="100%" style:font-name="Arial" fo:font-size="14pt" fo:font-weight="bold" fo:background-color="#ffff00" loext:char-shading-value="0" style:font-name-asian="Arial2" style:font-size-asian="14pt" style:font-weight-asian="bold" style:font-name-complex="Arial2" style:font-size-complex="14pt" style:font-weight-complex="bold"/>
    </style:style>
    <style:style style:name="T33" style:family="text">
      <style:text-properties fo:color="#1a6b72" loext:opacity="100%" style:font-name="Arial" fo:font-size="14pt" fo:font-weight="bold" fo:background-color="#ffd740" loext:char-shading-value="0" style:font-size-asian="14pt" style:font-weight-asian="bold" style:font-name-complex="Arial2" style:font-size-complex="14pt" style:font-weight-complex="bold"/>
    </style:style>
    <style:style style:name="T34" style:family="text">
      <style:text-properties fo:color="#1a6b72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35" style:family="text">
      <style:text-properties fo:color="#1a6b7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6" style:family="text">
      <style:text-properties fo:color="#1a6b72" loext:opacity="100%" style:font-name="Arial" fo:font-size="10pt" style:font-size-asian="10pt" style:font-name-complex="Arial2" style:font-size-complex="10pt"/>
    </style:style>
    <style:style style:name="T37" style:family="text">
      <style:text-properties fo:color="#1a6b72" loext:opacity="100%" style:font-name="Arial" fo:font-size="10pt" style:font-name-asian="Arial2" style:font-size-asian="10pt" style:font-name-complex="Arial2" style:font-size-complex="10pt"/>
    </style:style>
    <style:style style:name="T38" style:family="text">
      <style:text-properties fo:color="#1a6b72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39" style:family="text">
      <style:text-properties fo:color="#1a6b7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0" style:family="text">
      <style:text-properties fo:color="#1a6b72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41" style:family="text">
      <style:text-properties fo:color="#1a6b72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2" style:family="text">
      <style:text-properties fo:color="#1a6b72" loext:opacity="100%" fo:font-size="10pt" style:font-name-asian="Arial2" style:font-size-asian="10pt" style:font-name-complex="Arial2" style:font-size-complex="10pt"/>
    </style:style>
    <style:style style:name="T43" style:family="text">
      <style:text-properties fo:color="#1a6b72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4" style:family="text">
      <style:text-properties fo:color="#1a6b72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5" style:family="text">
      <style:text-properties fo:color="#1a6b72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6" style:family="text">
      <style:text-properties fo:color="#444444" loext:opacity="100%" style:font-name="Arial" fo:font-size="11pt" style:font-size-asian="11pt" style:font-name-complex="Arial2" style:font-size-complex="11pt"/>
    </style:style>
    <style:style style:name="T47" style:family="text">
      <style:text-properties fo:color="#444444" loext:opacity="100%" style:font-name="Arial" fo:font-size="11pt" style:font-name-asian="Arial2" style:font-size-asian="11pt" style:font-name-complex="Arial2" style:font-size-complex="11pt"/>
    </style:style>
    <style:style style:name="T48" style:family="text">
      <style:text-properties fo:color="#4444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49" style:family="text">
      <style:text-properties fo:color="#444444" loext:opacity="100%" style:font-name="Arial" fo:font-size="11pt" fo:font-weight="bold" fo:background-color="#ffd740" loext:char-shading-value="0" style:font-size-asian="11pt" style:font-weight-asian="bold" style:font-name-complex="Arial2" style:font-size-complex="11pt" style:font-weight-complex="bold"/>
    </style:style>
    <style:style style:name="T50" style:family="text">
      <style:text-properties fo:color="#444444" loext:opacity="100%" style:font-name="Arial" fo:font-size="11pt" fo:font-weight="bold" fo:background-color="#c6ff00" loext:char-shading-value="0" style:font-size-asian="11pt" style:font-weight-asian="bold" style:font-name-complex="Arial2" style:font-size-complex="11pt" style:font-weight-complex="bold"/>
    </style:style>
    <style:style style:name="T51" style:family="text">
      <style:text-properties fo:color="#444444" loext:opacity="100%" style:font-name="Arial" fo:font-size="11pt" fo:font-weight="bold" fo:background-color="#b2ff59" loext:char-shading-value="0" style:font-size-asian="11pt" style:font-weight-asian="bold" style:font-name-complex="Arial2" style:font-size-complex="11pt" style:font-weight-complex="bold"/>
    </style:style>
    <style:style style:name="T52" style:family="text">
      <style:text-properties fo:color="#444444" loext:opacity="100%" style:font-name="Arial" fo:font-size="11pt" fo:font-style="italic" style:font-name-asian="Arial2" style:font-size-asian="11pt" style:font-style-asian="italic"/>
    </style:style>
    <style:style style:name="T53" style:family="text">
      <style:text-properties fo:color="#444444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54" style:family="text">
      <style:text-properties fo:color="#44444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5" style:family="text">
      <style:text-properties fo:color="#444444" loext:opacity="100%" style:font-name="Arial" fo:font-size="10pt" style:font-size-asian="10pt" style:font-name-complex="Arial2" style:font-size-complex="10pt"/>
    </style:style>
    <style:style style:name="T56" style:family="text">
      <style:text-properties fo:color="#444444" loext:opacity="100%" style:font-name="Arial" fo:font-size="10pt" style:font-name-asian="Arial2" style:font-size-asian="10pt" style:font-name-complex="Arial2" style:font-size-complex="10pt"/>
    </style:style>
    <style:style style:name="T57" style:family="text">
      <style:text-properties fo:color="#444444" loext:opacity="100%" style:font-name="Arial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58" style:family="text">
      <style:text-properties fo:color="#444444" loext:opacity="100%" style:font-name="Arial" fo:font-size="10pt" fo:font-weight="bold" fo:background-color="#ffd740" loext:char-shading-value="0" style:font-size-asian="10pt" style:font-weight-asian="bold" style:font-name-complex="Arial2" style:font-size-complex="10pt" style:font-weight-complex="bold"/>
    </style:style>
    <style:style style:name="T59" style:family="text">
      <style:text-properties fo:color="#4444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60" style:family="text">
      <style:text-properties fo:color="#444444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61" style:family="text">
      <style:text-properties fo:color="#444444" loext:opacity="100%"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62" style:family="text">
      <style:text-properties fo:color="#444444" loext:opacity="100%" style:font-name="Arial" fo:font-size="9pt" fo:font-weight="normal" style:font-size-asian="9pt" style:font-weight-asian="normal" style:font-name-complex="Arial2" style:font-size-complex="9pt" style:font-weight-complex="normal"/>
    </style:style>
    <style:style style:name="T63" style:family="text">
      <style:text-properties fo:color="#444444" loext:opacity="100%" style:font-name="Arial" fo:font-size="9pt" style:font-name-asian="Arial2" style:font-size-asian="9pt" style:font-name-complex="Arial2" style:font-size-complex="9pt"/>
    </style:style>
    <style:style style:name="T64" style:family="text">
      <style:text-properties fo:color="#444444" loext:opacity="100%" style:font-name="Arial" fo:font-size="9pt" style:font-size-asian="9pt" style:font-name-complex="Arial2" style:font-size-complex="9pt"/>
    </style:style>
    <style:style style:name="T65" style:family="text">
      <style:text-properties fo:color="#444444" loext:opacity="100%" fo:font-size="11pt" style:font-name-asian="Arial2" style:font-size-asian="11pt" style:font-name-complex="Arial2" style:font-size-complex="11pt"/>
    </style:style>
    <style:style style:name="T66" style:family="text">
      <style:text-properties fo:color="#444444" loext:opacity="100%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67" style:family="text">
      <style:text-properties fo:color="#444444" loext:opacity="100%" fo:font-size="11pt" fo:font-weight="bold" fo:background-color="#c6ff00" loext:char-shading-value="0" style:font-name-asian="Arial2" style:font-size-asian="11pt" style:font-weight-asian="bold" style:font-name-complex="Arial2" style:font-size-complex="11pt" style:font-weight-complex="bold"/>
    </style:style>
    <style:style style:name="T68" style:family="text">
      <style:text-properties fo:color="#4444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69" style:family="text"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70" style:family="text">
      <style:text-properties fo:color="#444444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71" style:family="text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T72" style:family="text">
      <style:text-properties fo:color="#4444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3" style:family="text">
      <style:text-properties fo:color="#444444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4" style:family="text">
      <style:text-properties fo:color="#44444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75" style:family="text">
      <style:text-properties fo:color="#444444" loext:opacity="100%" fo:font-size="10pt" style:font-name-asian="Arial2" style:font-size-asian="10pt" style:font-name-complex="Arial2" style:font-size-complex="10pt"/>
    </style:style>
    <style:style style:name="T76" style:family="text">
      <style:text-properties fo:color="#444444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77" style:family="text">
      <style:text-properties fo:color="#4444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78" style:family="text">
      <style:text-properties fo:color="#444444" loext:opacity="100%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79" style:family="text">
      <style:text-properties fo:color="#444444" loext:opacity="100%" fo:font-size="9pt" style:font-name-asian="Arial2" style:font-size-asian="9pt" style:font-name-complex="Arial2" style:font-size-complex="9pt"/>
    </style:style>
    <style:style style:name="T80" style:family="text">
      <style:text-properties fo:color="#c9211e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81" style:family="text">
      <style:text-properties fo:color="#c9211e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82" style:family="text">
      <style:text-properties fo:color="#ff3d00" loext:opacity="100%" style:font-name="Arial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83" style:family="text">
      <style:text-properties fo:color="#ff3d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84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85" style:family="text">
      <style:text-properties fo:color="#ff3d00" loext:opacity="100%" style:font-name="Arial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86" style:family="text">
      <style:text-properties fo:color="#ff3d00" loext:opacity="100%" style:font-name="Arial" fo:font-size="13pt" fo:font-weight="bold" fo:background-color="#64ffda" loext:char-shading-value="0" style:font-size-asian="13pt" style:font-weight-asian="bold" style:font-name-complex="Arial2" style:font-size-complex="13pt" style:font-weight-complex="bold"/>
    </style:style>
    <style:style style:name="T87" style:family="text">
      <style:text-properties fo:color="#ff3d00" loext:opacity="100%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88" style:family="text">
      <style:text-properties fo:color="#ff3d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89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90" style:family="text">
      <style:text-properties fo:color="#ff3d00" loext:opacity="100%" style:font-name="Courier New" fo:font-size="10pt" fo:font-weight="bold" fo:background-color="#64ffda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91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2" style:family="text">
      <style:text-properties fo:color="#ff3d00" loext:opacity="100%" fo:font-size="9pt" fo:font-weight="bold" fo:background-color="#64ffda" loext:char-shading-value="0" style:font-name-asian="Arial2" style:font-size-asian="9pt" style:font-weight-asian="bold" style:font-name-complex="Arial2" style:font-size-complex="9pt" style:font-weight-complex="bold"/>
    </style:style>
    <style:style style:name="T93" style:family="text">
      <style:text-properties fo:color="#18ffff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94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95" style:family="text">
      <style:text-properties fo:color="#18ffff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96" style:family="text">
      <style:text-properties fo:color="#18ffff" loext:opacity="100%" fo:font-size="10pt" fo:font-weight="bold" fo:background-color="#e040fb" loext:char-shading-value="0" style:font-name-asian="Arial2" style:font-size-asian="10pt" style:font-weight-asian="bold" style:font-name-complex="Arial2" style:font-size-complex="10pt" style:font-weight-complex="bold"/>
    </style:style>
    <style:style style:name="T97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98" style:family="text">
      <style:text-properties fo:color="#18ffff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99" style:family="text">
      <style:text-properties fo:color="#18ffff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00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101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102" style:family="text">
      <style:text-properties fo:color="#18ffff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03" style:family="text">
      <style:text-properties fo:color="#18ffff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04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5" style:family="text">
      <style:text-properties fo:color="#18ffff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6" style:family="text">
      <style:text-properties fo:color="#18ffff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7" style:family="text">
      <style:text-properties fo:color="#18ffff" loext:opacity="100%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108" style:family="text">
      <style:text-properties fo:color="#e040fb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09" style:family="text">
      <style:text-properties fo:color="#e040fb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10" style:family="text">
      <style:text-properties fo:color="#7b3f00" loext:opacity="100%" fo:font-size="11pt" style:font-name-asian="Arial2" style:font-size-asian="11pt" style:font-name-complex="Arial2" style:font-size-complex="11pt"/>
    </style:style>
    <style:style style:name="T111" style:family="text">
      <style:text-properties fo:color="#7b3f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2" style:family="text">
      <style:text-properties fo:color="#7b3f00" loext:opacity="100%" style:font-name="Arial" fo:font-size="11pt" style:font-size-asian="11pt" style:font-name-complex="Arial2" style:font-size-complex="11pt"/>
    </style:style>
    <style:style style:name="T113" style:family="text">
      <style:text-properties fo:color="#7b3f00" loext:opacity="100%" style:font-name="Arial" fo:font-size="11pt" style:font-name-asian="Arial2" style:font-size-asian="11pt" style:font-name-complex="Arial2" style:font-size-complex="11pt"/>
    </style:style>
    <style:style style:name="T114" style:family="text">
      <style:text-properties fo:color="#7b3f00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15" style:family="text">
      <style:text-properties fo:color="#7b3f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6" style:family="text">
      <style:text-properties fo:color="#7b3f00" loext:opacity="100%" style:font-name="Arial" fo:font-size="10pt" style:font-size-asian="10pt" style:font-name-complex="Arial2" style:font-size-complex="10pt"/>
    </style:style>
    <style:style style:name="T117" style:family="text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T118" style:family="text">
      <style:text-properties fo:color="#7b3f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9" style:family="text">
      <style:text-properties fo:color="#7b3f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20" style:family="text">
      <style:text-properties fo:color="#7b3f00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121" style:family="text">
      <style:text-properties fo:color="#7b3f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2" style:family="text">
      <style:text-properties fo:color="#7b3f00" loext:opacity="100%" fo:font-size="10pt" style:font-name-asian="Arial2" style:font-size-asian="10pt" style:font-name-complex="Arial2" style:font-size-complex="10pt"/>
    </style:style>
    <style:style style:name="T123" style:family="text">
      <style:text-properties fo:color="#7b3f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4" style:family="text">
      <style:text-properties fo:color="#7b3f00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5" style:family="text">
      <style:text-properties fo:color="#7b3f00" loext:opacity="100%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26" style:family="text">
      <style:text-properties fo:color="#ff17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27" style:family="text">
      <style:text-properties fo:color="#ff17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28" style:family="text">
      <style:text-properties fo:color="#ff17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29" style:family="text">
      <style:text-properties fo:color="#ff17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0" style:family="text">
      <style:text-properties fo:color="#ff17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31" style:family="text">
      <style:text-properties fo:color="#1e5631" loext:opacity="100%" fo:font-size="10pt" style:font-name-asian="Arial2" style:font-size-asian="10pt" style:font-name-complex="Arial2" style:font-size-complex="10pt"/>
    </style:style>
    <style:style style:name="T132" style:family="text">
      <style:text-properties fo:color="#1e5631" loext:opacity="100%" style:font-name="Arial" fo:font-size="10pt" style:font-size-asian="10pt" style:font-name-complex="Arial2" style:font-size-complex="10pt"/>
    </style:style>
    <style:style style:name="T133" style:family="text">
      <style:text-properties fo:color="#1e5631" loext:opacity="100%" style:font-name="Arial" fo:font-size="10pt" style:font-name-asian="Arial2" style:font-size-asian="10pt" style:font-name-complex="Arial2" style:font-size-complex="10pt"/>
    </style:style>
    <style:style style:name="T134" style:family="text">
      <style:text-properties fo:color="#1e5631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35" style:family="text">
      <style:text-properties fo:color="#1e5631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6" style:family="text">
      <style:text-properties fo:color="#1e5631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137" style:family="text">
      <style:text-properties fo:color="#1e5631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38" style:family="text">
      <style:text-properties fo:color="#1e5631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9" style:family="text"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T140" style:family="text"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141" style:family="text">
      <style:text-properties fo:color="#1e5631" loext:opacity="100%" style:font-name="Courier New" fo:font-size="11pt" fo:font-weight="bold" fo:background-color="#ffff0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42" style:family="text">
      <style:text-properties fo:color="#1e5631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43" style:family="text">
      <style:text-properties fo:color="#ffd740" loext:opacity="100%" style:font-name="Arial" fo:font-size="10pt" fo:font-weight="bold" fo:background-color="#ff1744" loext:char-shading-value="0" style:font-size-asian="10pt" style:font-weight-asian="bold" style:font-name-complex="Arial2" style:font-size-complex="10pt" style:font-weight-complex="bold"/>
    </style:style>
    <style:style style:name="T144" style:family="text">
      <style:text-properties fo:color="#ffd74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45" style:family="text">
      <style:text-properties fo:color="#ffff00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46" style:family="text">
      <style:text-properties fo:color="#ffff00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47" style:family="text">
      <style:text-properties fo:color="#ffff00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48" style:family="text">
      <style:text-properties fo:color="#ffff00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49" style:family="text">
      <style:text-properties fo:color="#ffff00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50" style:family="text">
      <style:text-properties fo:color="#ffff0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51" style:family="text">
      <style:text-properties fo:color="#ffff00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52" style:family="text">
      <style:text-properties fo:color="#ffff00" loext:opacity="100%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153" style:family="text">
      <style:text-properties fo:color="#ffff00" loext:opacity="100%" style:font-name="Courier New" fo:font-size="11pt" fo:font-weight="bold" fo:background-color="#ef535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54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55" style:family="text">
      <style:text-properties fo:color="#76ff03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56" style:family="text">
      <style:text-properties fo:color="#76ff03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57" style:family="text">
      <style:text-properties fo:color="#76ff03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158" style:family="text">
      <style:text-properties fo:color="#76ff03" loext:opacity="100%" style:font-name="Arial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59" style:family="text">
      <style:text-properties fo:color="#76ff03" loext:opacity="100%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60" style:family="text">
      <style:text-properties fo:color="#76ff03" loext:opacity="100%" fo:font-size="9pt" fo:font-weight="bold" fo:background-color="#3d5afe" loext:char-shading-value="0" style:font-name-asian="Arial2" style:font-size-asian="9pt" style:font-weight-asian="bold" style:font-name-complex="Arial2" style:font-size-complex="9pt" style:font-weight-complex="bold"/>
    </style:style>
    <style:style style:name="T161" style:family="text">
      <style:text-properties fo:color="#8b0000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62" style:family="text">
      <style:text-properties fo:color="#8b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63" style:family="text">
      <style:text-properties fo:color="#8b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64" style:family="text">
      <style:text-properties fo:color="#8b0000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65" style:family="text">
      <style:text-properties fo:color="#8b00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66" style:family="text"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T167" style:family="text">
      <style:text-properties fo:color="#eeff41" loext:opacity="100%" style:font-name="Arial" fo:font-size="13pt" fo:font-weight="bold" fo:background-color="#3d5afe" loext:char-shading-value="0" style:font-size-asian="13pt" style:font-weight-asian="bold" style:font-name-complex="Arial2" style:font-size-complex="13pt" style:font-weight-complex="bold"/>
    </style:style>
    <style:style style:name="T168" style:family="text">
      <style:text-properties fo:color="#ff4081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69" style:family="text">
      <style:text-properties fo:color="#ff4081" loext:opacity="100%" style:font-name="Arial" fo:font-size="11pt" fo:font-weight="bold" fo:background-color="#ffffff" loext:char-shading-value="0" style:font-size-asian="11pt" style:font-weight-asian="bold" style:font-name-complex="Arial2" style:font-size-complex="11pt" style:font-weight-complex="bold"/>
    </style:style>
    <style:style style:name="T170" style:family="text">
      <style:text-properties fo:color="#ff4081" loext:opacity="100%" fo:font-size="11pt" fo:font-weight="bold" fo:background-color="#ffffff" loext:char-shading-value="0" style:font-name-asian="Arial2" style:font-size-asian="11pt" style:font-weight-asian="bold" style:font-name-complex="Arial2" style:font-size-complex="11pt" style:font-weight-complex="bold"/>
    </style:style>
    <style:style style:name="T171" style:family="text">
      <style:text-properties fo:color="#00e676" loext:opacity="100%" style:font-name="Courier New" fo:font-size="10pt" fo:font-weight="bold" fo:background-color="#5d4037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72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73" style:family="text">
      <style:text-properties fo:color="#eeeeee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74" style:family="text">
      <style:text-properties fo:color="#eeeeee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75" style:family="text">
      <style:text-properties fo:color="#ffc400" loext:opacity="100%" style:font-name="Courier New" fo:font-size="10pt" fo:font-weight="bold" fo:background-color="#0000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76" style:family="text">
      <style:text-properties fo:color="#ff5252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77" style:family="text">
      <style:text-properties fo:color="#ff5252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78" style:family="text">
      <style:text-properties fo:color="#c6ff00" loext:opacity="100%" style:font-name="Arial" fo:font-size="10pt" fo:font-weight="bold" fo:background-color="#651fff" loext:char-shading-value="0" style:font-size-asian="10pt" style:font-weight-asian="bold" style:font-name-complex="Arial2" style:font-size-complex="10pt" style:font-weight-complex="bold"/>
    </style:style>
    <style:style style:name="T179" style:family="text">
      <style:text-properties fo:color="#c6ff00" loext:opacity="100%" fo:font-size="10pt" fo:font-weight="bold" fo:background-color="#651fff" loext:char-shading-value="0" style:font-name-asian="Arial2" style:font-size-asian="10pt" style:font-weight-asian="bold" style:font-name-complex="Arial2" style:font-size-complex="10pt" style:font-weight-complex="bold"/>
    </style:style>
    <style:style style:name="T180" style:family="text">
      <style:text-properties fo:color="#f50057" loext:opacity="100%" style:font-name="Arial" fo:font-size="9pt" fo:font-weight="bold" fo:background-color="#ffff00" loext:char-shading-value="0" style:font-size-asian="9pt" style:font-weight-asian="bold" style:font-name-complex="Arial2" style:font-size-complex="9pt" style:font-weight-complex="bold"/>
    </style:style>
    <style:style style:name="T181" style:family="text">
      <style:text-properties fo:color="#f50057" loext:opacity="100%" fo:font-size="9pt" fo:font-weight="bold" fo:background-color="#ffff00" loext:char-shading-value="0" style:font-name-asian="Arial2" style:font-size-asian="9pt" style:font-weight-asian="bold" style:font-name-complex="Arial2" style:font-size-complex="9pt" style:font-weight-complex="bold"/>
    </style:style>
    <style:style style:name="T182" style:family="text">
      <style:text-properties fo:color="#ff91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183" style:family="text">
      <style:text-properties fo:color="#ff9100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84" style:family="text">
      <style:text-properties fo:color="#ff91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185" style:family="text">
      <style:text-properties fo:color="#ff9100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86" style:family="text">
      <style:text-properties fo:color="#b2ff59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87" style:family="text">
      <style:text-properties fo:color="#b2ff59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188" style:family="text">
      <style:text-properties fo:color="#b2ff59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89" style:family="text">
      <style:text-properties fo:color="#ff6e40" loext:opacity="100%" style:font-name="Courier New" fo:font-size="9pt" fo:font-weight="bold" fo:background-color="#3e272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90" style:family="text">
      <style:text-properties fo:color="#d500f9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91" style:family="text">
      <style:text-properties fo:color="#b71c1c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92" style:family="text">
      <style:text-properties fo:color="#c62828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93" style:family="text">
      <style:text-properties fo:color="#c62828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94" style:family="text">
      <style:text-properties fo:color="#c62828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6" loext:marker-style-name="T2"><text:span text:style-name="T1">運算式樹 </text:span><text:span text:style-name="T7">Expression Tree</text:span></text:p>
            <text:p text:style-name="P17" loext:marker-style-name="T10"><text:span text:style-name="T9">資訊類考試完整筆記 </text:span><text:span text:style-name="T11">· </text:span><text:span text:style-name="T9">從零開始到考試必勝</text:span></text:p>
          </table:table-cell>
        </table:table-row>
      </table:table>
      <text:p text:style-name="P1"/>
      <text:h text:style-name="P13" text:outline-level="1" loext:marker-style-name="T13"><text:span text:style-name="T12">第一部分：基本定義</text:span><text:span text:style-name="T13"/></text:h>
      <text:p text:style-name="P2"/>
      <text:h text:style-name="P12" text:outline-level="2" loext:marker-style-name="T31"><text:span text:style-name="T30">什麼是運算式樹 </text:span><text:span text:style-name="T31">(Expression Tree)</text:span><text:span text:style-name="T30">？</text:span></text:h>
      <text:p text:style-name="P25" loext:marker-style-name="T47"><text:span text:style-name="T46">運算式樹是一種特殊的二元樹，用來表示算術或邏輯運算式。它把整個算式的結構以樹狀方式呈現，讓電腦能清楚理解每一個運算的先後順序。</text:span><text:span text:style-name="T47"/></text:p>
      <text:p text:style-name="P3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4" loext:marker-style-name="T35"><text:span text:style-name="T34">核心規則（考試必記）</text:span><text:span text:style-name="T35"/></text:p>
            <text:p text:style-name="P5" loext:marker-style-name="T47"><text:span text:style-name="T65">• </text:span><text:span text:style-name="T80">葉節點 </text:span><text:span text:style-name="T81">(Leaf Node)</text:span><text:span text:style-name="T80">：存放 運算元 </text:span><text:span text:style-name="T81">(Operand)</text:span><text:span text:style-name="T46">，例如 </text:span><text:span text:style-name="T65">A</text:span><text:span text:style-name="T46">、</text:span><text:span text:style-name="T65">B</text:span><text:span text:style-name="T46">、</text:span><text:span text:style-name="T65">3</text:span><text:span text:style-name="T46">、</text:span><text:span text:style-name="T65">5</text:span></text:p>
            <text:p text:style-name="P5" loext:marker-style-name="T47"><text:span text:style-name="T65">• </text:span><text:span text:style-name="T82">內部節點 </text:span><text:span text:style-name="T87">(Internal Node)</text:span><text:span text:style-name="T82">：存放 運算子 </text:span><text:span text:style-name="T87">(Operator)</text:span><text:span text:style-name="T46">，例如 </text:span><text:span text:style-name="T65">+</text:span><text:span text:style-name="T46">、</text:span><text:span text:style-name="T65">-</text:span><text:span text:style-name="T46">、</text:span><text:span text:style-name="T65">×</text:span><text:span text:style-name="T46">、</text:span><text:span text:style-name="T65">÷</text:span></text:p>
            <text:p text:style-name="P5" loext:marker-style-name="T47"><text:span text:style-name="T65">•</text:span><text:span text:style-name="T93"> </text:span><text:span text:style-name="T108">通常是 </text:span><text:span text:style-name="T109">Full Binary Tree</text:span><text:span text:style-name="T46">（每個節點恰好有 </text:span><text:span text:style-name="T65">0 </text:span><text:span text:style-name="T46">或 </text:span><text:span text:style-name="T65">2 </text:span><text:span text:style-name="T46">個子節點）</text:span></text:p>
            <text:p text:style-name="P5" loext:marker-style-name="T113"><text:span text:style-name="T110">• </text:span><text:span text:style-name="T112">若允許一元運算子（如 </text:span><text:span text:style-name="T110">sin</text:span><text:span text:style-name="T112">、</text:span><text:span text:style-name="T110">sqrt</text:span><text:span text:style-name="T112">），則不一定是 </text:span><text:span text:style-name="T110">Full Binary Tree</text:span></text:p>
          </table:table-cell>
        </table:table-row>
      </table:table>
      <text:p text:style-name="P6"/>
      <text:h text:style-name="P12" text:outline-level="2" loext:marker-style-name="T31"><text:span text:style-name="T30">範例：</text:span><text:span text:style-name="T31">(A+B)×C </text:span><text:span text:style-name="T30">的運算式樹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8" loext:marker-style-name="T24"><text:span text:style-name="T24"><text:s text:c="7"/>×</text:span><text:span text:style-name="T24"/></text:p>
            <text:p text:style-name="P19" loext:marker-style-name="T25"><text:span text:style-name="T25"><text:s text:c="6"/>/ \</text:span><text:span text:style-name="T25"/></text:p>
            <text:p text:style-name="P19" loext:marker-style-name="T25"><text:span text:style-name="T25"><text:s text:c="25"/>+ <text:s text:c="2"/>C <text:s text:c="3"/>← 葉節點（運算元）</text:span><text:span text:style-name="T25"/></text:p>
            <text:p text:style-name="P20" loext:marker-style-name="T25"><text:span text:style-name="T25"><text:s text:c="4"/>/ \</text:span><text:span text:style-name="T25"/></text:p>
            <text:p text:style-name="P20" loext:marker-style-name="T25"><text:span text:style-name="T25"><text:s text:c="22"/>A <text:s text:c="2"/>B <text:s/>← 葉節點（運算元）</text:span><text:span text:style-name="T25"/></text:p>
            <text:p text:style-name="P7" loext:marker-style-name="T37"><text:span text:style-name="T126">× </text:span><text:span text:style-name="T127">和 </text:span><text:span text:style-name="T126">+ </text:span><text:span text:style-name="T127">是內部節點（運算子）</text:span><text:span text:style-name="T36">；</text:span><text:span text:style-name="T89">A</text:span><text:span text:style-name="T84">、</text:span><text:span text:style-name="T89">B</text:span><text:span text:style-name="T84">、</text:span><text:span text:style-name="T89">C </text:span><text:span text:style-name="T84">是葉節點（運算元）</text:span></text:p>
          </table:table-cell>
        </table:table-row>
      </table:table>
      <text:p text:style-name="P6"/>
      <text:p text:style-name="Standard"/>
      <text:h text:style-name="P14" text:outline-level="1" loext:marker-style-name="T13"><text:span text:style-name="T12">第二部分：三種走訪方式（</text:span><text:span text:style-name="T13">Traversal</text:span><text:span text:style-name="T12">）</text:span></text:h>
      <text:p text:style-name="P2"/>
      <text:p text:style-name="P25" loext:marker-style-name="T47"><text:span text:style-name="T46">這是 </text:span><text:span text:style-name="T65">Expression Tree </text:span><text:span text:style-name="T46">最核心的考點。三種走訪方式，對應三種不同的運算式表示法：</text:span></text:p>
      <text:p text:style-name="P8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Standard" loext:marker-style-name="T4"><text:span text:style-name="T3">走訪方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順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對應表示法</text:span><text:span text:style-name="T4"/></text:p>
          </table:table-cell>
          <table:table-cell table:style-name="表格4.A1" office:value-type="string">
            <text:p text:style-name="Standard" loext:marker-style-name="T4"><text:span text:style-name="T3">說明</text:span><text:span text:style-name="T4"/></text:p>
          </table:table-cell>
        </table:table-row>
        <table:table-row table:style-name="表格4.1">
          <table:table-cell table:style-name="表格4.A2" office:value-type="string">
            <text:p text:style-name="Standard" loext:marker-style-name="T133"><text:span text:style-name="T131">Preorder</text:span><text:span text:style-name="T132">（</text:span><text:span text:style-name="T143">前序</text:span><text:span text:style-name="T132">）</text:span></text:p>
          </table:table-cell>
          <table:table-cell table:style-name="表格4.A2" office:value-type="string">
            <text:p text:style-name="Standard" loext:marker-style-name="T146"><text:span text:style-name="T145">根 → 左 → 右</text:span><text:span text:style-name="T146"/></text:p>
          </table:table-cell>
          <table:table-cell table:style-name="表格4.A2" office:value-type="string">
            <text:p text:style-name="Standard" loext:marker-style-name="T133"><text:span text:style-name="T96">Pre</text:span><text:span text:style-name="T131">fix</text:span><text:span text:style-name="T132">（前置表示法）</text:span></text:p>
          </table:table-cell>
          <table:table-cell table:style-name="表格4.A2" office:value-type="string">
            <text:p text:style-name="Standard" loext:marker-style-name="T133"><text:span text:style-name="T132">第一個元素就是根</text:span><text:span text:style-name="T133"/></text:p>
          </table:table-cell>
        </table:table-row>
        <table:table-row table:style-name="表格4.1">
          <table:table-cell table:style-name="表格4.A3" office:value-type="string">
            <text:p text:style-name="Standard" loext:marker-style-name="T117"><text:span text:style-name="T122">Inorder</text:span><text:span text:style-name="T116">（</text:span><text:span text:style-name="T143">中序</text:span><text:span text:style-name="T116">）</text:span></text:p>
          </table:table-cell>
          <table:table-cell table:style-name="表格4.A3" office:value-type="string">
            <text:p text:style-name="Standard" loext:marker-style-name="T156"><text:span text:style-name="T155">左 → 根 → 右</text:span><text:span text:style-name="T156"/></text:p>
          </table:table-cell>
          <table:table-cell table:style-name="表格4.A3" office:value-type="string">
            <text:p text:style-name="Standard" loext:marker-style-name="T117"><text:span text:style-name="T96">In</text:span><text:span text:style-name="T122">fix</text:span><text:span text:style-name="T116">（中置表示法）</text:span></text:p>
          </table:table-cell>
          <table:table-cell table:style-name="表格4.A3" office:value-type="string">
            <text:p text:style-name="P29" loext:marker-style-name="T117"/>
          </table:table-cell>
        </table:table-row>
        <table:table-row table:style-name="表格4.1">
          <table:table-cell table:style-name="表格4.A4" office:value-type="string">
            <text:p text:style-name="Standard" loext:marker-style-name="T37"><text:span text:style-name="T42">Postorder</text:span><text:span text:style-name="T36">（</text:span><text:span text:style-name="T143">後序</text:span><text:span text:style-name="T36">）</text:span></text:p>
          </table:table-cell>
          <table:table-cell table:style-name="表格4.A4" office:value-type="string">
            <text:p text:style-name="Standard" loext:marker-style-name="T99"><text:span text:style-name="T98">左 → 右 → 根</text:span><text:span text:style-name="T99"/></text:p>
          </table:table-cell>
          <table:table-cell table:style-name="表格4.A4" office:value-type="string">
            <text:p text:style-name="Standard" loext:marker-style-name="T37"><text:span text:style-name="T96">Post</text:span><text:span text:style-name="T42">fix</text:span><text:span text:style-name="T36">（後置表示法）</text:span></text:p>
          </table:table-cell>
          <table:table-cell table:style-name="表格4.A4" office:value-type="string">
            <text:p text:style-name="Standard" loext:marker-style-name="T37"><text:span text:style-name="T36">最後才記錄根節點</text:span><text:span text:style-name="T37"/></text:p>
          </table:table-cell>
        </table:table-row>
      </table:table>
      <text:p text:style-name="P6"/>
      <text:h text:style-name="P12" text:outline-level="2" loext:marker-style-name="T31"><text:span text:style-name="T30">記憶口訣（考試當場不忘）</text:span><text:span text:style-name="T31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7" loext:marker-style-name="T135"><text:span text:style-name="T138">Preorder</text:span><text:span text:style-name="T134">（前序）：進房間立刻簽到 → 先記根，再走左右</text:span></text:p>
            <text:p text:style-name="P5" loext:marker-style-name="T115"><text:span text:style-name="T111">Inorder</text:span><text:span text:style-name="T114">（中序）：先進左房間，才簽到，再進右房間</text:span></text:p>
            <text:p text:style-name="P9" loext:marker-style-name="T35"><text:span text:style-name="T44">Postorder</text:span><text:span text:style-name="T34">（後序）：所有房間都查完，最後才簽退 → 根最後記錄</text:span></text:p>
          </table:table-cell>
        </table:table-row>
      </table:table>
      <text:p text:style-name="P6"/>
      <text:h text:style-name="P12" text:outline-level="2" loext:marker-style-name="T31"><text:span text:style-name="T30">重要注意事項：</text:span><text:span text:style-name="T31">Inorder </text:span><text:span text:style-name="T30">與原式的差異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" loext:marker-style-name="T162"><text:span text:style-name="T161">「中序走訪 </text:span><text:span text:style-name="T164">= </text:span><text:span text:style-name="T161">原始算式」這個說法並不完全準確！</text:span></text:p>
            <text:p text:style-name="P5" loext:marker-style-name="T47"><text:span text:style-name="T46">範例：樹的根為 </text:span><text:span text:style-name="T65">×</text:span><text:span text:style-name="T46">，左子樹為 </text:span><text:span text:style-name="T65">(A+B)</text:span><text:span text:style-name="T46">，右子樹為 </text:span><text:span text:style-name="T65">C</text:span></text:p>
            <text:p text:style-name="P5" loext:marker-style-name="T166"><text:span text:style-name="T166">中序走訪結果：A+B×C（少了括號！）</text:span><text:span text:style-name="T166"/></text:p>
            <text:p text:style-name="P9" loext:marker-style-name="T139"><text:span text:style-name="T139">原始算式應為：(A+B)×C（有括號才正確）</text:span><text:span text:style-name="T139"/></text:p>
            <text:p text:style-name="P31" loext:marker-style-name="T47"><text:span text:style-name="T46">結論：</text:span><text:span text:style-name="T102">中序走訪還原原式時，必要時需補上括號</text:span><text:span text:style-name="T46">，考試要特別留意。</text:span></text:p>
          </table:table-cell>
        </table:table-row>
      </table:table>
      <text:p text:style-name="Standard"/>
      <text:h text:style-name="P14" text:outline-level="1" loext:marker-style-name="T13"><text:span text:style-name="T12">第三部分：如何建立 </text:span><text:span text:style-name="T13">Expression Tree</text:span><text:span text:style-name="T12">（從算式長出樹）</text:span></text:h>
      <text:p text:style-name="P2"/>
      <text:p text:style-name="P25" loext:marker-style-name="T47"><text:span text:style-name="T46">核心原則只有一句：</text:span><text:span text:style-name="T47"/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 loext:marker-style-name="T19"><text:span text:style-name="T18">「</text:span><text:span text:style-name="T167">找最後執行的運算子</text:span><text:span text:style-name="T18">，</text:span><text:span text:style-name="T86">它就是目前子樹的根節點</text:span><text:span text:style-name="T18">。」</text:span></text:p>
          </table:table-cell>
        </table:table-row>
      </table:table>
      <text:p text:style-name="P6"/>
      <text:h text:style-name="P12" text:outline-level="2" loext:marker-style-name="T31"><text:span text:style-name="T31">112</text:span><text:span text:style-name="T30">題實戰：</text:span><text:span text:style-name="T32">A/B-C+D×E-A×C</text:span><text:span text:style-name="T31"> → </text:span><text:span text:style-name="T30">建樹步驟</text:span></text:h>
      <text:p text:style-name="P25" loext:marker-style-name="T24"><text:span text:style-name="T24">原式：A/B-C+D×E-A×C</text:span><text:span text:style-name="T24"/></text:p>
      <text:p text:style-name="P3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Standard" loext:marker-style-name="T4"><text:span text:style-name="T3">步驟</text:span><text:span text:style-name="T4"/></text:p>
          </table:table-cell>
          <table:table-cell table:style-name="表格8.A1" office:value-type="string">
            <text:p text:style-name="Standard" loext:marker-style-name="T4"><text:span text:style-name="T3">重點問題</text:span><text:span text:style-name="T4"/></text:p>
          </table:table-cell>
          <table:table-cell table:style-name="表格8.A1" office:value-type="string">
            <text:p text:style-name="Standard" loext:marker-style-name="T4"><text:span text:style-name="T3">說明與結果</text:span><text:span text:style-name="T4"/></text:p>
          </table:table-cell>
        </table:table-row>
        <table:table-row table:style-name="表格8.1">
          <table:table-cell table:style-name="表格8.A2" office:value-type="string">
            <text:p text:style-name="P5" loext:marker-style-name="T39"><text:span text:style-name="T38">步驟 </text:span><text:span text:style-name="T43">1</text:span></text:p>
          </table:table-cell>
          <table:table-cell table:style-name="表格8.A2" office:value-type="string">
            <text:p text:style-name="P5" loext:marker-style-name="T54"><text:span text:style-name="T100">找高優先權運算</text:span><text:span text:style-name="T53">（</text:span><text:span text:style-name="T168">乘除先</text:span><text:span text:style-name="T53">）</text:span></text:p>
          </table:table-cell>
          <table:table-cell table:style-name="表格8.A2" office:value-type="string">
            <text:p text:style-name="P5" loext:marker-style-name="T69"><text:span text:style-name="T69">圈出：</text:span><text:span text:style-name="T171">(A/B)</text:span><text:span text:style-name="T69">、</text:span><text:span text:style-name="T171">(D×E)</text:span><text:span text:style-name="T69">、</text:span><text:span text:style-name="T171">(A×C)</text:span></text:p>
            <text:p text:style-name="P5" loext:marker-style-name="T69"><text:span text:style-name="T69">整理：(A/B)-C+(D×E)-(A×C)</text:span><text:span text:style-name="T69"/></text:p>
          </table:table-cell>
        </table:table-row>
        <table:table-row table:style-name="表格8.1">
          <table:table-cell table:style-name="表格8.A3" office:value-type="string">
            <text:p text:style-name="P5" loext:marker-style-name="T39"><text:span text:style-name="T38">步驟 </text:span><text:span text:style-name="T43">2</text:span></text:p>
          </table:table-cell>
          <table:table-cell table:style-name="表格8.A3" office:value-type="string">
            <text:p text:style-name="P5" loext:marker-style-name="T148"><text:span text:style-name="T147">找最後執行的運算子</text:span><text:span text:style-name="T148"/></text:p>
          </table:table-cell>
          <table:table-cell table:style-name="表格8.A3" office:value-type="string">
            <text:p text:style-name="P5" loext:marker-style-name="T69"><text:span text:style-name="T69">加減同優先，從左往右：</text:span><text:span text:style-name="T69"/></text:p>
            <text:p text:style-name="P5" loext:marker-style-name="T69"><text:span text:style-name="T69">①(A/B)-C <text:s/>②①+(D×E) <text:s/>③②-(A×C)</text:span><text:span text:style-name="T69"/></text:p>
            <text:p text:style-name="P5" loext:marker-style-name="T90"><text:span text:style-name="T90">最後是 [ - ]，所以樹根 = -</text:span><text:span text:style-name="T90"/></text:p>
          </table:table-cell>
        </table:table-row>
        <table:table-row table:style-name="表格8.1">
          <table:table-cell table:style-name="表格8.A2" office:value-type="string">
            <text:p text:style-name="P5" loext:marker-style-name="T39"><text:span text:style-name="T38">步驟 </text:span><text:span text:style-name="T43">3</text:span></text:p>
          </table:table-cell>
          <table:table-cell table:style-name="表格8.A2" office:value-type="string">
            <text:p text:style-name="P5" loext:marker-style-name="T174"><text:span text:style-name="T173">切左右子樹</text:span><text:span text:style-name="T174"/></text:p>
          </table:table-cell>
          <table:table-cell table:style-name="表格8.A2" office:value-type="string">
            <text:p text:style-name="P5" loext:marker-style-name="T70"><text:span text:style-name="T70">左子樹：((A/B)-C)+(D×E)</text:span><text:span text:style-name="T70"/></text:p>
            <text:p text:style-name="P5" loext:marker-style-name="T70"><text:span text:style-name="T70">右子樹：(A×C)</text:span><text:span text:style-name="T70"/></text:p>
          </table:table-cell>
        </table:table-row>
        <table:table-row table:style-name="表格8.1">
          <table:table-cell table:style-name="表格8.A3" office:value-type="string">
            <text:p text:style-name="P5" loext:marker-style-name="T39"><text:span text:style-name="T38">步驟 </text:span><text:span text:style-name="T43">4</text:span></text:p>
          </table:table-cell>
          <table:table-cell table:style-name="表格8.A3" office:value-type="string">
            <text:p text:style-name="P5" loext:marker-style-name="T54"><text:span text:style-name="T53">遞迴處理左子樹</text:span><text:span text:style-name="T54"/></text:p>
          </table:table-cell>
          <table:table-cell table:style-name="表格8.A3" office:value-type="string">
            <text:p text:style-name="P5" loext:marker-style-name="T69"><text:span text:style-name="T175">左子樹最後算 +，再往下拆</text:span><text:span text:style-name="T69">：</text:span></text:p>
            <text:p text:style-name="P5" loext:marker-style-name="T70"><text:span text:style-name="T70">左：(A/B)-C，右：D×E</text:span><text:span text:style-name="T70"/></text:p>
          </table:table-cell>
        </table:table-row>
        <table:table-row table:style-name="表格8.1">
          <table:table-cell table:style-name="表格8.A2" office:value-type="string">
            <text:p text:style-name="P5" loext:marker-style-name="T39"><text:span text:style-name="T38">步驟 </text:span><text:span text:style-name="T43">5</text:span></text:p>
          </table:table-cell>
          <table:table-cell table:style-name="表格8.A2" office:value-type="string">
            <text:p text:style-name="P5" loext:marker-style-name="T54"><text:span text:style-name="T53">遞迴處理 </text:span><text:span text:style-name="T74">(A/B)-C</text:span></text:p>
          </table:table-cell>
          <table:table-cell table:style-name="表格8.A2" office:value-type="string">
            <text:p text:style-name="P5" loext:marker-style-name="T69"><text:span text:style-name="T175">最後算 -</text:span><text:span text:style-name="T69">，</text:span><text:span text:style-name="T70">左：A/B，右：C</text:span></text:p>
          </table:table-cell>
        </table:table-row>
        <table:table-row table:style-name="表格8.1">
          <table:table-cell table:style-name="表格8.A3" office:value-type="string">
            <text:p text:style-name="P5" loext:marker-style-name="T39"><text:span text:style-name="T38">步驟 </text:span><text:span text:style-name="T43">6</text:span></text:p>
          </table:table-cell>
          <table:table-cell table:style-name="表格8.A3" office:value-type="string">
            <text:p text:style-name="P5" loext:marker-style-name="T54"><text:span text:style-name="T53">處理 </text:span><text:span text:style-name="T74">A/B</text:span></text:p>
          </table:table-cell>
          <table:table-cell table:style-name="表格8.A3" office:value-type="string">
            <text:p text:style-name="P5" loext:marker-style-name="T69"><text:span text:style-name="T175">最後算 /</text:span><text:span text:style-name="T69">，</text:span><text:span text:style-name="T70">左：A，右：B</text:span></text:p>
          </table:table-cell>
        </table:table-row>
      </table:table>
      <text:p text:style-name="P10"/>
      <text:p text:style-name="P32" loext:marker-style-name="T121"><text:span text:style-name="T124">112</text:span><text:span text:style-name="T120">題完整表達式樹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33" loext:marker-style-name="T27"><text:span text:style-name="T27"><text:s text:c="15"/>- <text:s text:c="9"/>&lt;- 根節點（最後執行）</text:span><text:span text:style-name="T27"/></text:p>
            <text:p text:style-name="P34" loext:marker-style-name="T27"><text:span text:style-name="T27"><text:s text:c="13"/>/ <text:s text:c="2"/>\</text:span><text:span text:style-name="T27"/></text:p>
            <text:p text:style-name="P34" loext:marker-style-name="T27"><text:span text:style-name="T27"><text:s text:c="12"/>+ <text:s text:c="4"/>*</text:span><text:span text:style-name="T27"/></text:p>
            <text:p text:style-name="P34" loext:marker-style-name="T27"><text:span text:style-name="T27"><text:s text:c="11"/>/ \ <text:s text:c="2"/>/ \</text:span><text:span text:style-name="T27"/></text:p>
            <text:p text:style-name="P34" loext:marker-style-name="T27"><text:span text:style-name="T27"><text:s text:c="10"/>- <text:s text:c="2"/>* A <text:s text:c="2"/>C</text:span><text:span text:style-name="T27"/></text:p>
            <text:p text:style-name="P34" loext:marker-style-name="T27"><text:span text:style-name="T27"><text:s text:c="9"/>/ \ / \</text:span><text:span text:style-name="T27"/></text:p>
            <text:p text:style-name="P34" loext:marker-style-name="T27"><text:span text:style-name="T27"><text:s text:c="8"/>/ <text:s/>C D <text:s text:c="2"/>E</text:span><text:span text:style-name="T27"/></text:p>
            <text:p text:style-name="P34" loext:marker-style-name="T27"><text:span text:style-name="T27"><text:s text:c="7"/>/ \</text:span><text:span text:style-name="T27"/></text:p>
            <text:p text:style-name="P35" loext:marker-style-name="T27"><text:span text:style-name="T27"><text:s text:c="6"/>A <text:s text:c="2"/>B</text:span><text:span text:style-name="T27"/></text:p>
          </table:table-cell>
        </table:table-row>
      </table:table>
      <text:p text:style-name="P10"/>
      <text:p text:style-name="P32" loext:marker-style-name="T121"><text:span text:style-name="T124">112</text:span><text:span text:style-name="T120">題答案驗證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7"><text:span text:style-name="T134">前序 </text:span><text:span text:style-name="T138">(Preorder)</text:span><text:span text:style-name="T134">：</text:span><text:span text:style-name="T25"> <text:s/>-+-/ABC×DE×AC</text:span></text:p>
            <text:p text:style-name="P5"><text:span text:style-name="T34">後序 </text:span><text:span text:style-name="T44">(Postorder)</text:span><text:span text:style-name="T34">：</text:span><text:span text:style-name="T25"> <text:s/>AB/C-DE×+AC×-</text:span></text:p>
            <text:p text:style-name="P9"><text:span text:style-name="T114">中序 </text:span><text:span text:style-name="T111">(Inorder)</text:span><text:span text:style-name="T114">：</text:span><text:span text:style-name="T25"> <text:s/>A/B-C+D×E-A×C <text:s/>（還原為原始算式）</text:span></text:p>
            <text:p text:style-name="P31" loext:marker-style-name="T56"><text:span text:style-name="T75">★ </text:span><text:span text:style-name="T55">圖片原始標示：前序 </text:span><text:span text:style-name="T75">+-/ABC*DE*AC</text:span><text:span text:style-name="T55">，後序 </text:span><text:span text:style-name="T75">AB/C-DE*+AC*-</text:span><text:span text:style-name="T55">（與上方一致，</text:span><text:span text:style-name="T75">× </text:span><text:span text:style-name="T55">以 </text:span><text:span text:style-name="T75">* </text:span><text:span text:style-name="T55">符號表示）</text:span></text:p>
          </table:table-cell>
        </table:table-row>
      </table:table>
      <text:p text:style-name="Standard"><text:soft-page-break/></text:p>
      <text:h text:style-name="P14" text:outline-level="1" loext:marker-style-name="T13"><text:span text:style-name="T12">第四部分：</text:span><text:span text:style-name="T14">Postfix Stack </text:span><text:span text:style-name="T15">求值</text:span></text:h>
      <text:p text:style-name="P2"/>
      <text:p text:style-name="P25" loext:marker-style-name="T47"><text:span text:style-name="T65">Postfix</text:span><text:span text:style-name="T46">（後置式）最大的優點：</text:span><text:span text:style-name="T48">不需要括號</text:span><text:span text:style-name="T46">，</text:span><text:span text:style-name="T49">不需要考慮優先權</text:span><text:span text:style-name="T46">，</text:span><text:span text:style-name="T102">只要用 </text:span><text:span text:style-name="T94">Stack </text:span><text:span text:style-name="T102">就能計算</text:span><text:span text:style-name="T46">。</text:span></text:p>
      <text:p text:style-name="P8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7" loext:marker-style-name="T21"><text:span text:style-name="T29">Postfix Stack </text:span><text:span text:style-name="T20">計算規則</text:span></text:p>
            <text:p text:style-name="P5" loext:marker-style-name="T47"><text:span text:style-name="T65">① </text:span><text:span text:style-name="T48">從左往右讀取每個符號</text:span></text:p>
            <text:p text:style-name="P36" loext:marker-style-name="T47"><text:span text:style-name="T65">② </text:span><text:span text:style-name="T49">看到 運算元（數字</text:span><text:span text:style-name="T66">/</text:span><text:span text:style-name="T49">變數）</text:span><text:span text:style-name="T46">→ </text:span><text:span text:style-name="T103">直接 </text:span><text:span text:style-name="T95">Push </text:span><text:span text:style-name="T103">進 </text:span><text:span text:style-name="T95">Stack</text:span></text:p>
            <text:p text:style-name="P37" loext:marker-style-name="T47"><text:span text:style-name="T65">③ </text:span><text:span text:style-name="T50">看到 運算子（</text:span><text:span text:style-name="T67">+</text:span><text:span text:style-name="T50">、</text:span><text:span text:style-name="T67">-</text:span><text:span text:style-name="T50">、</text:span><text:span text:style-name="T67">×</text:span><text:span text:style-name="T50">、</text:span><text:span text:style-name="T67">÷</text:span><text:span text:style-name="T50">）</text:span><text:span text:style-name="T46">→ </text:span><text:span text:style-name="T87">Pop </text:span><text:span text:style-name="T82">兩個值計算，結果 </text:span><text:span text:style-name="T87">Push </text:span><text:span text:style-name="T82">回 </text:span><text:span text:style-name="T87">Stack</text:span></text:p>
            <text:p text:style-name="P31" loext:marker-style-name="T163"><text:span text:style-name="T165">⚠️ </text:span><text:span text:style-name="T149">重要：</text:span><text:span text:style-name="T151">Pop </text:span><text:span text:style-name="T149">順序是「先 </text:span><text:span text:style-name="T151">Pop </text:span><text:span text:style-name="T149">的是右運算元，後 </text:span><text:span text:style-name="T151">Pop </text:span><text:span text:style-name="T149">的是左運算元」</text:span></text:p>
            <text:p text:style-name="P38" loext:marker-style-name="T56"><text:span text:style-name="T55">例：</text:span><text:span text:style-name="T176">Stack </text:span><text:span text:style-name="T177">由上到下為 </text:span><text:span text:style-name="T176">[5, 2]</text:span><text:span text:style-name="T55">，遇到 </text:span><text:span text:style-name="T75">-</text:span><text:span text:style-name="T55">，計算 </text:span><text:span text:style-name="T75">2 - 5 = -3</text:span><text:span text:style-name="T55">（</text:span><text:span text:style-name="T157">先</text:span><text:span text:style-name="T159">Pop</text:span><text:span text:style-name="T157">的</text:span><text:span text:style-name="T159">5</text:span><text:span text:style-name="T157">是右</text:span><text:span text:style-name="T55">，</text:span><text:span text:style-name="T178">後</text:span><text:span text:style-name="T179">Pop</text:span><text:span text:style-name="T178">的</text:span><text:span text:style-name="T179">2</text:span><text:span text:style-name="T178">是左</text:span><text:span text:style-name="T55">）</text:span></text:p>
          </table:table-cell>
        </table:table-row>
      </table:table>
      <text:p text:style-name="P6"/>
      <text:h text:style-name="P12" text:outline-level="2" loext:marker-style-name="T31"><text:span text:style-name="T31">113</text:span><text:span text:style-name="T30">題實戰：</text:span><text:span text:style-name="T31">36 12 ÷ 10 23 - × 50 40 - +</text:span></text:h>
      <text:p text:style-name="P25" loext:marker-style-name="T35"><text:span text:style-name="T34">答案 </text:span><text:span text:style-name="T44">= -29</text:span></text:p>
      <text:p text:style-name="P3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2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2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1"><text:span text:style-name="T78">①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36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Push 36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[36]</text:span><text:span text:style-name="T61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1"><text:span text:style-name="T78">②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12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Push 12 </text:span><text:span text:style-name="T157">先</text:span><text:span text:style-name="T159">Pop</text:span><text:span text:style-name="T157">的是右</text:span><text:span text:style-name="T62"> </text:span></text:p>
          </table:table-cell>
          <table:table-cell table:style-name="表格12.A3" office:value-type="string">
            <text:p text:style-name="Standard" loext:marker-style-name="T61"><text:span text:style-name="T78">[36, 12]</text:span><text:span text:style-name="T61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1"><text:span text:style-name="T78">③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÷</text:span><text:span text:style-name="T61"/></text:p>
          </table:table-cell>
          <table:table-cell table:style-name="表格12.A2" office:value-type="string">
            <text:p text:style-name="Standard" loext:marker-style-name="T61"><text:span text:style-name="T160">Pop 12</text:span><text:span text:style-name="T78">, Pop 36</text:span><text:span text:style-name="T62">，</text:span><text:span text:style-name="T180">計算 </text:span><text:span text:style-name="T181">36÷</text:span><text:span text:style-name="T160">12</text:span><text:span text:style-name="T181">=3</text:span><text:span text:style-name="T180">，</text:span><text:span text:style-name="T181">Push 3</text:span></text:p>
          </table:table-cell>
          <table:table-cell table:style-name="表格12.A2" office:value-type="string">
            <text:p text:style-name="Standard" loext:marker-style-name="T61"><text:span text:style-name="T78">[3]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36÷12=3</text:span><text:span text:style-name="T61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61"><text:span text:style-name="T78">④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10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Push 10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[3, 10]</text:span><text:span text:style-name="T61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1"><text:span text:style-name="T78">⑤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23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Push 23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[3, 10, 23]</text:span><text:span text:style-name="T61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1"><text:span text:style-name="T78">⑥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-</text:span><text:span text:style-name="T61"/></text:p>
          </table:table-cell>
          <table:table-cell table:style-name="表格12.A3" office:value-type="string">
            <text:p text:style-name="Standard" loext:marker-style-name="T61"><text:span text:style-name="T160">Pop 23</text:span><text:span text:style-name="T78">, Pop 10</text:span><text:span text:style-name="T62">，計算 </text:span><text:span text:style-name="T78">10-</text:span><text:span text:style-name="T160">23</text:span><text:span text:style-name="T78">=-13</text:span><text:span text:style-name="T62">，</text:span><text:span text:style-name="T78">Push -13</text:span></text:p>
          </table:table-cell>
          <table:table-cell table:style-name="表格12.A3" office:value-type="string">
            <text:p text:style-name="Standard" loext:marker-style-name="T61"><text:span text:style-name="T78">[3, -13]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10-23=-13</text:span><text:span text:style-name="T61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1"><text:span text:style-name="T78">⑦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×</text:span><text:span text:style-name="T61"/></text:p>
          </table:table-cell>
          <table:table-cell table:style-name="表格12.A2" office:value-type="string">
            <text:p text:style-name="Standard" loext:marker-style-name="T61"><text:span text:style-name="T160">Pop -13</text:span><text:span text:style-name="T78">, Pop 3</text:span><text:span text:style-name="T62">，計算 </text:span><text:span text:style-name="T78">3×</text:span><text:span text:style-name="T160">(-13)</text:span><text:span text:style-name="T78">=-39</text:span><text:span text:style-name="T62">，</text:span><text:span text:style-name="T78">Push -39</text:span></text:p>
          </table:table-cell>
          <table:table-cell table:style-name="表格12.A2" office:value-type="string">
            <text:p text:style-name="Standard" loext:marker-style-name="T61"><text:span text:style-name="T78">[-39]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3×(-13)=-39</text:span><text:span text:style-name="T61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61"><text:span text:style-name="T78">⑧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50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Push 50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[-39, 50]</text:span><text:span text:style-name="T61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1"><text:span text:style-name="T78">⑨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40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Push 40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[-39, 50, 40]</text:span><text:span text:style-name="T61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1"><text:span text:style-name="T78">⑩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-</text:span><text:span text:style-name="T61"/></text:p>
          </table:table-cell>
          <table:table-cell table:style-name="表格12.A3" office:value-type="string">
            <text:p text:style-name="Standard" loext:marker-style-name="T61"><text:span text:style-name="T160">Pop 40</text:span><text:span text:style-name="T78">, Pop 50</text:span><text:span text:style-name="T62">，計算 </text:span><text:span text:style-name="T78">50-</text:span><text:span text:style-name="T160">40</text:span><text:span text:style-name="T78">=10</text:span><text:span text:style-name="T62">，</text:span><text:span text:style-name="T78">Push 10</text:span></text:p>
          </table:table-cell>
          <table:table-cell table:style-name="表格12.A3" office:value-type="string">
            <text:p text:style-name="Standard" loext:marker-style-name="T61"><text:span text:style-name="T78">[-39, 10]</text:span><text:span text:style-name="T61"/></text:p>
          </table:table-cell>
          <table:table-cell table:style-name="表格12.A3" office:value-type="string">
            <text:p text:style-name="Standard" loext:marker-style-name="T61"><text:span text:style-name="T78">50-40=10</text:span><text:span text:style-name="T61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1"><text:span text:style-name="T78">⑪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+</text:span><text:span text:style-name="T61"/></text:p>
          </table:table-cell>
          <table:table-cell table:style-name="表格12.A2" office:value-type="string">
            <text:p text:style-name="Standard" loext:marker-style-name="T61"><text:span text:style-name="T160">Pop 10</text:span><text:span text:style-name="T78">, Pop -39</text:span><text:span text:style-name="T62">，計算 </text:span><text:span text:style-name="T78">-39+</text:span><text:span text:style-name="T160">10</text:span><text:span text:style-name="T78">=-29</text:span><text:span text:style-name="T62">，</text:span><text:span text:style-name="T78">Push -29</text:span></text:p>
          </table:table-cell>
          <table:table-cell table:style-name="表格12.A2" office:value-type="string">
            <text:p text:style-name="Standard" loext:marker-style-name="T61"><text:span text:style-name="T78">[-29]</text:span><text:span text:style-name="T61"/></text:p>
          </table:table-cell>
          <table:table-cell table:style-name="表格12.A2" office:value-type="string">
            <text:p text:style-name="Standard" loext:marker-style-name="T61"><text:span text:style-name="T78">-39+10=-29</text:span><text:span text:style-name="T61"/></text:p>
          </table:table-cell>
        </table:table-row>
        <table:table-row table:style-name="表格12.1">
          <table:table-cell table:style-name="表格12.A13" office:value-type="string">
            <text:p text:style-name="Standard" loext:marker-style-name="T137"><text:span text:style-name="T136">結果</text:span><text:span text:style-name="T137"/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37"><text:span text:style-name="T142">Stack </text:span><text:span text:style-name="T136">剩下 </text:span><text:span text:style-name="T142">-29</text:span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37"><text:span text:style-name="T142">★ </text:span><text:span text:style-name="T136">答案 </text:span><text:span text:style-name="T142">= -29</text:span></text:p>
          </table:table-cell>
        </table:table-row>
      </table:table>
      <text:p text:style-name="P6"/>
      <text:h text:style-name="P12" text:outline-level="2" loext:marker-style-name="T31"><text:span text:style-name="T31">114</text:span><text:span text:style-name="T30">題實戰：</text:span><text:span text:style-name="T31">2 5 × 4 2 + - 6 +</text:span></text:h>
      <text:p text:style-name="P25" loext:marker-style-name="T35"><text:span text:style-name="T34">答案 </text:span><text:span text:style-name="T44">= 10</text:span></text:p>
      <text:p text:style-name="P3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3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3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61"><text:span text:style-name="T78">①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2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Push 2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[2]</text:span><text:span text:style-name="T61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61"><text:span text:style-name="T78">②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5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Push 5 <text:s/></text:span><text:span text:style-name="T84">先</text:span><text:span text:style-name="T89">Pop</text:span><text:span text:style-name="T84">的是右</text:span></text:p>
          </table:table-cell>
          <table:table-cell table:style-name="表格13.A3" office:value-type="string">
            <text:p text:style-name="Standard" loext:marker-style-name="T61"><text:span text:style-name="T78">[2, 5]</text:span><text:span text:style-name="T61"/>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Standard" loext:marker-style-name="T61"><text:span text:style-name="T78">③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×</text:span><text:span text:style-name="T61"/></text:p>
          </table:table-cell>
          <table:table-cell table:style-name="表格13.A2" office:value-type="string">
            <text:p text:style-name="Standard" loext:marker-style-name="T61"><text:span text:style-name="T92">Pop 5</text:span><text:span text:style-name="T78">, Pop 2</text:span><text:span text:style-name="T62">，計算 </text:span><text:span text:style-name="T78">2×</text:span><text:span text:style-name="T92">5</text:span><text:span text:style-name="T78">=10</text:span><text:span text:style-name="T62">，</text:span><text:span text:style-name="T78">Push 10</text:span></text:p>
          </table:table-cell>
          <table:table-cell table:style-name="表格13.A2" office:value-type="string">
            <text:p text:style-name="Standard" loext:marker-style-name="T61"><text:span text:style-name="T78">[10]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2×5=10</text:span><text:span text:style-name="T61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61"><text:span text:style-name="T78">④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4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Push 4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[10, 4]</text:span><text:span text:style-name="T61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61"><text:span text:style-name="T78">⑤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2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Push 2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[10, 4, 2]</text:span><text:span text:style-name="T61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61"><text:span text:style-name="T78">⑥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+</text:span><text:span text:style-name="T61"/></text:p>
          </table:table-cell>
          <table:table-cell table:style-name="表格13.A3" office:value-type="string">
            <text:p text:style-name="Standard" loext:marker-style-name="T61"><text:span text:style-name="T92">Pop 2</text:span><text:span text:style-name="T78">, Pop 4</text:span><text:span text:style-name="T62">，計算 </text:span><text:span text:style-name="T78">4+</text:span><text:span text:style-name="T92">2</text:span><text:span text:style-name="T78">=6</text:span><text:span text:style-name="T62">，</text:span><text:span text:style-name="T78">Push 6</text:span></text:p>
          </table:table-cell>
          <table:table-cell table:style-name="表格13.A3" office:value-type="string">
            <text:p text:style-name="Standard" loext:marker-style-name="T61"><text:span text:style-name="T78">[10, 6]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4+2=6</text:span><text:span text:style-name="T61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61"><text:span text:style-name="T78">⑦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-</text:span><text:span text:style-name="T61"/></text:p>
          </table:table-cell>
          <table:table-cell table:style-name="表格13.A2" office:value-type="string">
            <text:p text:style-name="Standard" loext:marker-style-name="T61"><text:span text:style-name="T92">Pop 6</text:span><text:span text:style-name="T78">, Pop 10</text:span><text:span text:style-name="T62">，計算 </text:span><text:span text:style-name="T78">10-</text:span><text:span text:style-name="T92">6</text:span><text:span text:style-name="T78">=4</text:span><text:span text:style-name="T62">，</text:span><text:span text:style-name="T78">Push 4</text:span></text:p>
          </table:table-cell>
          <table:table-cell table:style-name="表格13.A2" office:value-type="string">
            <text:p text:style-name="Standard" loext:marker-style-name="T61"><text:span text:style-name="T78">[4]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10-6=4</text:span><text:span text:style-name="T61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61"><text:span text:style-name="T78">⑧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6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Push 6</text:span><text:span text:style-name="T61"/></text:p>
          </table:table-cell>
          <table:table-cell table:style-name="表格13.A3" office:value-type="string">
            <text:p text:style-name="Standard" loext:marker-style-name="T61"><text:span text:style-name="T78">[4, 6]</text:span><text:span text:style-name="T61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61"><text:span text:style-name="T78">⑨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+</text:span><text:span text:style-name="T61"/></text:p>
          </table:table-cell>
          <table:table-cell table:style-name="表格13.A2" office:value-type="string">
            <text:p text:style-name="Standard" loext:marker-style-name="T61"><text:span text:style-name="T92">Pop</text:span><text:span text:style-name="T78"> 6, Pop 4</text:span><text:span text:style-name="T62">，計算 </text:span><text:span text:style-name="T78">4+</text:span><text:span text:style-name="T92">6</text:span><text:span text:style-name="T78">=10</text:span><text:span text:style-name="T62">，</text:span><text:span text:style-name="T78">Push 10</text:span></text:p>
          </table:table-cell>
          <table:table-cell table:style-name="表格13.A2" office:value-type="string">
            <text:p text:style-name="Standard" loext:marker-style-name="T61"><text:span text:style-name="T78">[10]</text:span><text:span text:style-name="T61"/></text:p>
          </table:table-cell>
          <table:table-cell table:style-name="表格13.A2" office:value-type="string">
            <text:p text:style-name="Standard" loext:marker-style-name="T61"><text:span text:style-name="T78">4+6=10</text:span><text:span text:style-name="T61"/></text:p>
          </table:table-cell>
        </table:table-row>
        <table:table-row table:style-name="表格13.1">
          <table:table-cell table:style-name="表格13.A11" office:value-type="string">
            <text:p text:style-name="Standard" loext:marker-style-name="T137"><text:span text:style-name="T136">結果</text:span><text:span text:style-name="T137"/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37"><text:span text:style-name="T142">Stack </text:span><text:span text:style-name="T136">剩下 </text:span><text:span text:style-name="T142">10</text:span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37"><text:span text:style-name="T142">★ </text:span><text:span text:style-name="T136">答案 </text:span><text:span text:style-name="T142">= 10</text:span></text:p>
          </table:table-cell>
        </table:table-row>
      </table:table>
      <text:p text:style-name="Standard"/>
      <text:h text:style-name="P14" text:outline-level="1" loext:marker-style-name="T13"><text:span text:style-name="T12">第五部分：大範例完整解析（答案 </text:span><text:span text:style-name="T13">198</text:span><text:span text:style-name="T12">）</text:span></text:h>
      <text:p text:style-name="P2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" loext:marker-style-name="T24"><text:span text:style-name="T24">算式：((6×(5-3))-(1+2))×(((4+2)÷3)+(5×4))</text:span><text:span text:style-name="T24"/></text:p>
          </table:table-cell>
        </table:table-row>
      </table:table>
      <text:p text:style-name="P8"/>
      <text:h text:style-name="P12" text:outline-level="2" loext:marker-style-name="T31"><text:span text:style-name="T30">建樹（一步一步拆解）</text:span><text:span text:style-name="T31"/></text:h>
      <text:p text:style-name="P4"><text:span text:style-name="T34">步驟 </text:span><text:span text:style-name="T44">1</text:span><text:span text:style-name="T34">：</text:span><text:span text:style-name="T48">最外層最後算</text:span><text:span text:style-name="T46">：</text:span><text:span text:style-name="T66">× <text:s/>→ <text:s/></text:span><text:span text:style-name="T49">根節點 </text:span><text:span text:style-name="T66">= ×</text:span></text:p>
      <text:p text:style-name="P4"><text:span text:style-name="T34">步驟 </text:span><text:span text:style-name="T44">2</text:span><text:span text:style-name="T34">：</text:span><text:span text:style-name="T46">左子樹：</text:span><text:span text:style-name="T65">((6×(5-3))-(1+2))</text:span><text:span text:style-name="T46">，</text:span><text:span text:style-name="T48">最後算 </text:span><text:span text:style-name="T68">-</text:span></text:p>
      <text:p text:style-name="P4"><text:span text:style-name="T34">步驟 </text:span><text:span text:style-name="T44">3</text:span><text:span text:style-name="T34">：</text:span><text:span text:style-name="T46">左子樹左邊：</text:span><text:span text:style-name="T65">6×(5-3)</text:span><text:span text:style-name="T46">，</text:span><text:span text:style-name="T48">最後算 </text:span><text:span text:style-name="T68">×</text:span></text:p>
      <text:p text:style-name="P4"><text:span text:style-name="T34">步驟 </text:span><text:span text:style-name="T44">4</text:span><text:span text:style-name="T34">：</text:span><text:span text:style-name="T46">再拆：</text:span><text:span text:style-name="T65">5-3 </text:span><text:span text:style-name="T48">最後算 </text:span><text:span text:style-name="T68">-</text:span><text:span text:style-name="T46">，葉節點 </text:span><text:span text:style-name="T65">5 </text:span><text:span text:style-name="T46">和 </text:span><text:span text:style-name="T65">3</text:span></text:p>
      <text:p text:style-name="P4"><text:span text:style-name="T34">步驟 </text:span><text:span text:style-name="T44">5</text:span><text:span text:style-name="T34">：</text:span><text:span text:style-name="T46">左子樹右邊：</text:span><text:span text:style-name="T65">1+2</text:span><text:span text:style-name="T46">，葉節點 </text:span><text:span text:style-name="T65">1 </text:span><text:span text:style-name="T46">和 </text:span><text:span text:style-name="T65">2</text:span></text:p>
      <text:p text:style-name="P4"><text:span text:style-name="T34">步驟 </text:span><text:span text:style-name="T44">6</text:span><text:span text:style-name="T34">：</text:span><text:span text:style-name="T46">右子樹：</text:span><text:span text:style-name="T65">((4+2)÷3)+(5×4)</text:span><text:span text:style-name="T46">，</text:span><text:span text:style-name="T48">最後算 </text:span><text:span text:style-name="T68">+</text:span></text:p>
      <text:p text:style-name="P4"><text:span text:style-name="T34">步驟 </text:span><text:span text:style-name="T44">7</text:span><text:span text:style-name="T34">：</text:span><text:span text:style-name="T46">右子樹左邊：</text:span><text:span text:style-name="T65">(4+2)÷3</text:span><text:span text:style-name="T46">，</text:span><text:span text:style-name="T48">最後算 </text:span><text:span text:style-name="T68">÷</text:span></text:p>
      <text:p text:style-name="P4"><text:span text:style-name="T34">步驟 </text:span><text:span text:style-name="T44">8</text:span><text:span text:style-name="T34">：</text:span><text:span text:style-name="T46">再拆：</text:span><text:span text:style-name="T65">4+2</text:span><text:span text:style-name="T46">，葉節點 </text:span><text:span text:style-name="T65">4 </text:span><text:span text:style-name="T46">和 </text:span><text:span text:style-name="T65">2</text:span></text:p>
      <text:p text:style-name="P4"><text:span text:style-name="T34">步驟 </text:span><text:span text:style-name="T44">9</text:span><text:span text:style-name="T34">：</text:span><text:span text:style-name="T46">右子樹右邊：</text:span><text:span text:style-name="T65">5×4</text:span><text:span text:style-name="T46">，葉節點 </text:span><text:span text:style-name="T65">5 </text:span><text:span text:style-name="T46">和 </text:span><text:span text:style-name="T65">4</text:span></text:p>
      <text:p text:style-name="P8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2" loext:marker-style-name="T35"><text:span text:style-name="T34">完整表達式樹</text:span><text:span text:style-name="T35"/></text:p>
            <text:p text:style-name="P39" loext:marker-style-name="T28"><text:span text:style-name="T28"><text:s text:c="19"/>* <text:s text:c="30"/>&lt;- 根節點</text:span><text:span text:style-name="T28"/></text:p>
            <text:p text:style-name="P34" loext:marker-style-name="T28"><text:span text:style-name="T28"><text:s text:c="17"/>/ <text:s text:c="2"/>\</text:span><text:span text:style-name="T28"/></text:p>
            <text:p text:style-name="P34" loext:marker-style-name="T28"><text:span text:style-name="T28"><text:s text:c="10"/>- <text:s text:c="16"/>+</text:span><text:span text:style-name="T28"/></text:p>
            <text:p text:style-name="P34" loext:marker-style-name="T28"><text:span text:style-name="T28"><text:s text:c="8"/>/ <text:s text:c="2"/>\ <text:s text:c="12"/>/ <text:s text:c="2"/>\</text:span><text:span text:style-name="T28"/></text:p>
            <text:p text:style-name="P34" loext:marker-style-name="T28"><text:span text:style-name="T28"><text:s text:c="5"/>* <text:s text:c="8"/>+ <text:s text:c="6"/>/ <text:s text:c="8"/>*</text:span><text:span text:style-name="T28"/></text:p>
            <text:p text:style-name="P34" loext:marker-style-name="T28"><text:span text:style-name="T28"><text:s text:c="3"/>/ <text:s text:c="2"/>\ <text:s text:c="4"/>/ <text:s text:c="2"/>\ <text:s text:c="2"/>/ <text:s text:c="2"/>\ <text:s text:c="4"/>/ <text:s text:c="2"/>\</text:span><text:span text:style-name="T28"/></text:p>
            <text:p text:style-name="P35" loext:marker-style-name="T28"><text:span text:style-name="T28"><text:s text:c="2"/>6 <text:s text:c="4"/>- <text:s text:c="2"/>1 <text:s text:c="4"/>2 + <text:s text:c="4"/>3 <text:s text:c="2"/>5 <text:s text:c="4"/>4</text:span><text:span text:style-name="T28"/></text:p>
            <text:p text:style-name="P35" loext:marker-style-name="T28"><text:span text:style-name="T28"><text:s text:c="6"/>/ <text:s text:c="2"/>\ <text:s text:c="6"/>/ <text:s text:c="2"/>\</text:span><text:span text:style-name="T28"/></text:p>
            <text:p text:style-name="P35" loext:marker-style-name="T28"><text:span text:style-name="T28"><text:s text:c="5"/>5 <text:s text:c="4"/>3 <text:s text:c="4"/>4 <text:s text:c="4"/>2</text:span><text:span text:style-name="T28"/></text:p>
          </table:table-cell>
        </table:table-row>
      </table:table>
      <text:p text:style-name="P10"/>
      <text:h text:style-name="P12" text:outline-level="2" loext:marker-style-name="T31"><text:span text:style-name="T31">Postorder </text:span><text:span text:style-name="T30">求值（</text:span><text:span text:style-name="T31">Bottom-Up</text:span><text:span text:style-name="T30">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Standard" loext:marker-style-name="T4"><text:span text:style-name="T3">步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計算內容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結果</text:span><text:span text:style-name="T4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4"><text:span text:style-name="T74">①</text:span><text:span text:style-name="T54"/></text:p>
          </table:table-cell>
          <table:table-cell table:style-name="表格16.A2" office:value-type="string">
            <text:p text:style-name="Standard" loext:marker-style-name="T54"><text:span text:style-name="T74">5-3</text:span><text:span text:style-name="T54"/></text:p>
          </table:table-cell>
          <table:table-cell table:style-name="表格16.A2" office:value-type="string">
            <text:p text:style-name="Standard" loext:marker-style-name="T54"><text:span text:style-name="T74">= 2</text:span><text:span text:style-name="T54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4"><text:span text:style-name="T74">②</text:span><text:span text:style-name="T54"/></text:p>
          </table:table-cell>
          <table:table-cell table:style-name="表格16.A3" office:value-type="string">
            <text:p text:style-name="Standard" loext:marker-style-name="T54"><text:span text:style-name="T74">6×2</text:span><text:span text:style-name="T54"/></text:p>
          </table:table-cell>
          <table:table-cell table:style-name="表格16.A3" office:value-type="string">
            <text:p text:style-name="Standard" loext:marker-style-name="T54"><text:span text:style-name="T74">= 12</text:span><text:span text:style-name="T54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4"><text:span text:style-name="T74">③</text:span><text:span text:style-name="T54"/></text:p>
          </table:table-cell>
          <table:table-cell table:style-name="表格16.A2" office:value-type="string">
            <text:p text:style-name="Standard" loext:marker-style-name="T54"><text:span text:style-name="T74">1+2</text:span><text:span text:style-name="T54"/></text:p>
          </table:table-cell>
          <table:table-cell table:style-name="表格16.A2" office:value-type="string">
            <text:p text:style-name="Standard" loext:marker-style-name="T54"><text:span text:style-name="T74">= 3</text:span><text:span text:style-name="T54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4"><text:span text:style-name="T74">④</text:span><text:span text:style-name="T54"/></text:p>
          </table:table-cell>
          <table:table-cell table:style-name="表格16.A3" office:value-type="string">
            <text:p text:style-name="Standard" loext:marker-style-name="T54"><text:span text:style-name="T74">12-3</text:span><text:span text:style-name="T53">（左子樹完成）</text:span></text:p>
          </table:table-cell>
          <table:table-cell table:style-name="表格16.A3" office:value-type="string">
            <text:p text:style-name="Standard" loext:marker-style-name="T57"><text:span text:style-name="T76">= 9</text:span><text:span text:style-name="T57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4"><text:span text:style-name="T74">⑤</text:span><text:span text:style-name="T54"/></text:p>
          </table:table-cell>
          <table:table-cell table:style-name="表格16.A2" office:value-type="string">
            <text:p text:style-name="Standard" loext:marker-style-name="T54"><text:span text:style-name="T74">4+2</text:span><text:span text:style-name="T54"/></text:p>
          </table:table-cell>
          <table:table-cell table:style-name="表格16.A2" office:value-type="string">
            <text:p text:style-name="Standard" loext:marker-style-name="T54"><text:span text:style-name="T74">= 6</text:span><text:span text:style-name="T54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4"><text:span text:style-name="T74">⑥</text:span><text:span text:style-name="T54"/></text:p>
          </table:table-cell>
          <table:table-cell table:style-name="表格16.A3" office:value-type="string">
            <text:p text:style-name="Standard" loext:marker-style-name="T54"><text:span text:style-name="T74">6÷3</text:span><text:span text:style-name="T54"/></text:p>
          </table:table-cell>
          <table:table-cell table:style-name="表格16.A3" office:value-type="string">
            <text:p text:style-name="Standard" loext:marker-style-name="T54"><text:span text:style-name="T74">= 2</text:span><text:span text:style-name="T54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4"><text:span text:style-name="T74">⑦</text:span><text:span text:style-name="T54"/></text:p>
          </table:table-cell>
          <table:table-cell table:style-name="表格16.A2" office:value-type="string">
            <text:p text:style-name="Standard" loext:marker-style-name="T54"><text:span text:style-name="T74">5×4</text:span><text:span text:style-name="T54"/></text:p>
          </table:table-cell>
          <table:table-cell table:style-name="表格16.A2" office:value-type="string">
            <text:p text:style-name="Standard" loext:marker-style-name="T54"><text:span text:style-name="T74">= 20</text:span><text:span text:style-name="T54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4"><text:span text:style-name="T74">⑧</text:span><text:span text:style-name="T54"/></text:p>
          </table:table-cell>
          <table:table-cell table:style-name="表格16.A3" office:value-type="string">
            <text:p text:style-name="Standard" loext:marker-style-name="T54"><text:span text:style-name="T74">2+20</text:span><text:span text:style-name="T53">（右子樹完成）</text:span></text:p>
          </table:table-cell>
          <table:table-cell table:style-name="表格16.A3" office:value-type="string">
            <text:p text:style-name="Standard" loext:marker-style-name="T57"><text:span text:style-name="T76">= 22</text:span><text:span text:style-name="T57"/></text:p>
          </table:table-cell>
        </table:table-row>
        <table:table-row table:style-name="表格16.1">
          <table:table-cell table:style-name="表格16.A10" office:value-type="string">
            <text:p text:style-name="Standard" loext:marker-style-name="T118"><text:span text:style-name="T123">⑨</text:span><text:span text:style-name="T118"/></text:p>
          </table:table-cell>
          <table:table-cell table:style-name="表格16.A10" office:value-type="string">
            <text:p text:style-name="Standard" loext:marker-style-name="T118"><text:span text:style-name="T123">9×22</text:span><text:span text:style-name="T119">（根節點）</text:span></text:p>
          </table:table-cell>
          <table:table-cell table:style-name="表格16.A10" office:value-type="string">
            <text:p text:style-name="Standard" loext:marker-style-name="T118"><text:span text:style-name="T123">= 198 ★</text:span><text:span text:style-name="T118"/></text:p>
          </table:table-cell>
        </table:table-row>
      </table:table>
      <text:p text:style-name="P10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7" loext:marker-style-name="T21"><text:span text:style-name="T20">為什麼用 </text:span><text:span text:style-name="T29">Postorder</text:span><text:span text:style-name="T20">？這個範例完美說明了一條鏈：</text:span></text:p>
            <text:p text:style-name="P23" loext:marker-style-name="T35"><text:span text:style-name="T44">Expression Tree <text:s/>→ <text:s/>Postorder </text:span><text:span text:style-name="T34">走訪 <text:s/>→ <text:s/></text:span><text:span text:style-name="T44">Postfix </text:span><text:span text:style-name="T34">算式 <text:s/>→ <text:s/></text:span><text:span text:style-name="T44">Stack </text:span><text:span text:style-name="T34">求值 <text:s/>→ <text:s/>答案 </text:span><text:span text:style-name="T44">198</text:span></text:p>
          </table:table-cell>
        </table:table-row>
      </table:table>
      <text:p text:style-name="Standard"/>
      <text:h text:style-name="P14" text:outline-level="1" loext:marker-style-name="T13"><text:span text:style-name="T12">第六部分：</text:span><text:span text:style-name="T14">Infix </text:span><text:span text:style-name="T15">轉 </text:span><text:span text:style-name="T14">Postfix</text:span><text:span text:style-name="T12">（超高頻考題）</text:span></text:h>
      <text:p text:style-name="P2"/>
      <text:p text:style-name="P25" loext:marker-style-name="T47"><text:span text:style-name="T46">這是資訊類考試最常考的題型之一，必須熟練。</text:span><text:span text:style-name="T47"/></text:p>
      <text:p text:style-name="P8"/>
      <text:h text:style-name="P12" text:outline-level="2" loext:marker-style-name="T31"><text:span text:style-name="T30">優先權表（考前必背）</text:span><text:span text:style-name="T31"/>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Standard" loext:marker-style-name="T4"><text:span text:style-name="T3">運算子</text:span><text:span text:style-name="T4"/></text:p>
          </table:table-cell>
          <table:table-cell table:style-name="表格18.A1" office:value-type="string">
            <text:p text:style-name="Standard" loext:marker-style-name="T4"><text:span text:style-name="T3">優先權（數字越大越高）</text:span><text:span text:style-name="T4"/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57"><text:span text:style-name="T76">× <text:s/>÷</text:span><text:span text:style-name="T58">（乘、除）</text:span></text:p>
          </table:table-cell>
          <table:table-cell table:style-name="表格18.A2" office:value-type="string">
            <text:p text:style-name="Standard" loext:marker-style-name="T101"><text:span text:style-name="T100">優先權 </text:span><text:span text:style-name="T97">2</text:span><text:span text:style-name="T100">（高）</text:span></text:p>
          </table:table-cell>
        </table:table-row>
        <table:table-row table:style-name="表格18.1">
          <table:table-cell table:style-name="表格18.A3" office:value-type="string">
            <text:p text:style-name="Standard" loext:marker-style-name="T60"><text:span text:style-name="T77">+ -</text:span><text:span text:style-name="T59">（加、減）</text:span></text:p>
          </table:table-cell>
          <table:table-cell table:style-name="表格18.A3" office:value-type="string">
            <text:p text:style-name="Standard" loext:marker-style-name="T158"><text:span text:style-name="T157">優先權 </text:span><text:span text:style-name="T159">1</text:span><text:span text:style-name="T157">（低）</text:span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85"><text:span text:style-name="T84">（ <text:s/>）（括號）</text:span><text:span text:style-name="T85"/></text:p>
          </table:table-cell>
          <table:table-cell table:style-name="表格18.A2" office:value-type="string">
            <text:p text:style-name="Standard" loext:marker-style-name="T85"><text:span text:style-name="T84">特殊處理（見規則）</text:span><text:span text:style-name="T85"/></text:p>
          </table:table-cell>
        </table:table-row>
      </table:table>
      <text:p text:style-name="P10"/>
      <text:h text:style-name="P12" text:outline-level="2" loext:marker-style-name="T31"><text:span text:style-name="T30">演算法步驟（</text:span><text:span text:style-name="T31">5</text:span><text:span text:style-name="T30">條規則）</text:span>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7" loext:marker-style-name="T47"><text:span text:style-name="T46">規則 </text:span><text:span text:style-name="T65">1</text:span><text:span text:style-name="T46">：</text:span><text:span text:style-name="T48">遇到 運算元（</text:span><text:span text:style-name="T68">A</text:span><text:span text:style-name="T48">、</text:span><text:span text:style-name="T68">B</text:span><text:span text:style-name="T48">、</text:span><text:span text:style-name="T68">1</text:span><text:span text:style-name="T48">、</text:span><text:span text:style-name="T68">2 </text:span><text:span text:style-name="T48">等）</text:span><text:span text:style-name="T46">→ </text:span><text:span text:style-name="T169">直接輸出到結果</text:span></text:p>
            <text:p text:style-name="P38" loext:marker-style-name="T47"><text:span text:style-name="T46">規則 </text:span><text:span text:style-name="T65">2</text:span><text:span text:style-name="T46">：</text:span><text:span text:style-name="T83">遇到 左括號 </text:span><text:span text:style-name="T88">(</text:span><text:span text:style-name="T65"> → </text:span><text:span text:style-name="T46">直接 </text:span><text:span text:style-name="T65">Push </text:span><text:span text:style-name="T46">進 </text:span><text:span text:style-name="T65">Stack</text:span></text:p>
            <text:p text:style-name="P38" loext:marker-style-name="T47"><text:span text:style-name="T46">規則 </text:span><text:span text:style-name="T65">3</text:span><text:span text:style-name="T46">：</text:span><text:span text:style-name="T182">遇到 右括號 </text:span><text:span text:style-name="T184">)</text:span><text:span text:style-name="T65"> → </text:span><text:span text:style-name="T102">持續 </text:span><text:span text:style-name="T94">Pop </text:span><text:span text:style-name="T102">並輸出</text:span><text:span text:style-name="T46">，</text:span><text:span text:style-name="T186">直到遇見左括號 </text:span><text:span text:style-name="T187">( </text:span><text:span text:style-name="T186">為止</text:span><text:span text:style-name="T46">（</text:span><text:span text:style-name="T144">括號本身不輸出</text:span><text:span text:style-name="T46">）</text:span></text:p>
            <text:p text:style-name="P38" loext:marker-style-name="T47"><text:span text:style-name="T46">規則 </text:span><text:span text:style-name="T65">4</text:span><text:span text:style-name="T46">：</text:span><text:span text:style-name="T49">遇到 運算子（</text:span><text:span text:style-name="T66">+</text:span><text:span text:style-name="T49">、</text:span><text:span text:style-name="T66">-</text:span><text:span text:style-name="T49">、</text:span><text:span text:style-name="T66">×</text:span><text:span text:style-name="T49">、</text:span><text:span text:style-name="T66">÷</text:span><text:span text:style-name="T49">）</text:span><text:span text:style-name="T46">→ </text:span><text:span text:style-name="T82">若 </text:span><text:span text:style-name="T87">Stack </text:span><text:span text:style-name="T82">頂端運算子優先權 ≥ 目前運算子</text:span><text:span text:style-name="T46">，</text:span><text:span text:style-name="T102">先 </text:span><text:span text:style-name="T94">Pop </text:span><text:span text:style-name="T102">再 </text:span><text:span text:style-name="T94">Push</text:span><text:span text:style-name="T102">；否則直接 </text:span><text:span text:style-name="T94">Push</text:span><text:span text:style-name="T185">(</text:span><text:span text:style-name="T183">當看到新的運算子時：如果 </text:span><text:span text:style-name="T185">Stack </text:span><text:span text:style-name="T183">裡面的運算子比它更早算就：先拿</text:span><text:span text:style-name="T185">Stack </text:span><text:span text:style-name="T183">裡面的運算子來輸出</text:span><text:span text:style-name="T185">)</text:span></text:p>
            <text:p text:style-name="P37" loext:marker-style-name="T47"><text:span text:style-name="T46">規則 </text:span><text:span text:style-name="T65">5</text:span><text:span text:style-name="T46">：</text:span><text:span text:style-name="T48">讀取結束 </text:span><text:span text:style-name="T46">→ </text:span><text:span text:style-name="T169">把 </text:span><text:span text:style-name="T170">Stack </text:span><text:span text:style-name="T169">剩餘的所有運算子全部 </text:span><text:span text:style-name="T170">Pop </text:span><text:span text:style-name="T169">並輸出</text:span></text:p>
          </table:table-cell>
        </table:table-row>
      </table:table>
      <text:p text:style-name="P10"/>
      <text:h text:style-name="P12" text:outline-level="2" loext:marker-style-name="T31"><text:span text:style-name="T31">5 </text:span><text:span text:style-name="T30">道練習題完整解析</text:span></text:h>
      <text:p text:style-name="P32" loext:marker-style-name="T121"><text:span text:style-name="T120">題目 </text:span><text:span text:style-name="T124">1</text:span><text:span text:style-name="T120">：</text:span><text:span text:style-name="T125">A+B*C</text:span>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0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0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0.A2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0.A2" office:value-type="string">
            <text:p text:style-name="Standard" loext:marker-style-name="T71"><text:span text:style-name="T71">（空）</text:span><text:span text:style-name="T71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1"><text:span text:style-name="T71">+</text:span><text:span text:style-name="T71"/></text:p>
          </table:table-cell>
          <table:table-cell table:style-name="表格20.A3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0.A3" office:value-type="string">
            <text:p text:style-name="Standard" loext:marker-style-name="T71"><text:span text:style-name="T71">+</text:span><text:span text:style-name="T71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1"><text:span text:style-name="T71">B</text:span><text:span text:style-name="T71"/></text:p>
          </table:table-cell>
          <table:table-cell table:style-name="表格20.A2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0.A2" office:value-type="string">
            <text:p text:style-name="Standard" loext:marker-style-name="T71"><text:span text:style-name="T71">+</text:span><text:span text:style-name="T71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1"><text:span text:style-name="T71">*</text:span><text:span text:style-name="T71"/></text:p>
          </table:table-cell>
          <table:table-cell table:style-name="表格20.A3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0.A3" office:value-type="string">
            <text:p text:style-name="Standard" loext:marker-style-name="T71"><text:span text:style-name="T72">+ *</text:span><text:span text:style-name="T71"> <text:s text:c="4"/>(</text:span><text:span text:style-name="T91">* &gt; +，直接放入</text:span><text:span text:style-name="T71">)</text:span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1"><text:span text:style-name="T71">C</text:span><text:span text:style-name="T71"/></text:p>
          </table:table-cell>
          <table:table-cell table:style-name="表格20.A2" office:value-type="string">
            <text:p text:style-name="Standard" loext:marker-style-name="T71"><text:span text:style-name="T71">ABC</text:span><text:span text:style-name="T71"/></text:p>
          </table:table-cell>
          <table:table-cell table:style-name="表格20.A2" office:value-type="string">
            <text:p text:style-name="Standard" loext:marker-style-name="T71"><text:span text:style-name="T71">+ *</text:span><text:span text:style-name="T71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1"><text:span text:style-name="T71">結束</text:span><text:span text:style-name="T71"/></text:p>
          </table:table-cell>
          <table:table-cell table:style-name="表格20.A3" office:value-type="string">
            <text:p text:style-name="Standard" loext:marker-style-name="T71"><text:span text:style-name="T71">ABC</text:span><text:span text:style-name="T104">*+</text:span></text:p>
          </table:table-cell>
          <table:table-cell table:style-name="表格20.A3" office:value-type="string">
            <text:p text:style-name="Standard" loext:marker-style-name="T71"><text:span text:style-name="T71">（全部 </text:span><text:span text:style-name="T188">Pop：先 *，再 +</text:span><text:span text:style-name="T71">）</text:span>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5" loext:marker-style-name="T140"><text:span text:style-name="T140">★ 答案：</text:span><text:span text:style-name="T153">ABC*+</text:span></text:p>
          </table:table-cell>
          <table:covered-table-cell/>
          <table:covered-table-cell/>
        </table:table-row>
      </table:table>
      <text:p text:style-name="P8"/>
      <text:p text:style-name="P32" loext:marker-style-name="T121"><text:span text:style-name="T120">題目 </text:span><text:span text:style-name="T124">2</text:span><text:span text:style-name="T120">：</text:span><text:span text:style-name="T125">(A+B)*C</text:span>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1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1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1"><text:span text:style-name="T71">(</text:span><text:span text:style-name="T71"/></text:p>
          </table:table-cell>
          <table:table-cell table:style-name="表格21.A2" office:value-type="string">
            <text:p text:style-name="Standard" loext:marker-style-name="T71"><text:span text:style-name="T71">（空）</text:span><text:span text:style-name="T71"/></text:p>
          </table:table-cell>
          <table:table-cell table:style-name="表格21.A2" office:value-type="string">
            <text:p text:style-name="Standard" loext:marker-style-name="T71"><text:span text:style-name="T71">(</text:span><text:span text:style-name="T71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1.A3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1.A3" office:value-type="string">
            <text:p text:style-name="Standard" loext:marker-style-name="T71"><text:span text:style-name="T71">(</text:span><text:span text:style-name="T71"/></text:p>
          </table:table-cell>
        </table:table-row>
        <text:soft-page-break/>
        <table:table-row table:style-name="表格21.1">
          <table:table-cell table:style-name="表格21.A2" office:value-type="string">
            <text:p text:style-name="Standard" loext:marker-style-name="T71"><text:span text:style-name="T71">+</text:span><text:span text:style-name="T71"/></text:p>
          </table:table-cell>
          <table:table-cell table:style-name="表格21.A2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1.A2" office:value-type="string">
            <text:p text:style-name="Standard" loext:marker-style-name="T72"><text:span text:style-name="T72">( +</text:span><text:span text:style-name="T72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1"><text:span text:style-name="T71">B</text:span><text:span text:style-name="T71"/></text:p>
          </table:table-cell>
          <table:table-cell table:style-name="表格21.A3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1.A3" office:value-type="string">
            <text:p text:style-name="Standard" loext:marker-style-name="T71"><text:span text:style-name="T71">( +</text:span><text:span text:style-name="T71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1"><text:span text:style-name="T71">)</text:span><text:span text:style-name="T71"/></text:p>
          </table:table-cell>
          <table:table-cell table:style-name="表格21.A2" office:value-type="string">
            <text:p text:style-name="Standard" loext:marker-style-name="T71"><text:span text:style-name="T71">AB</text:span><text:span text:style-name="T73">+</text:span></text:p>
          </table:table-cell>
          <table:table-cell table:style-name="表格21.A2" office:value-type="string">
            <text:p text:style-name="Standard" loext:marker-style-name="T91"><text:span text:style-name="T91">（空） <text:s/>← Pop 到 ( 為止</text:span><text:span text:style-name="T91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1"><text:span text:style-name="T71">*</text:span><text:span text:style-name="T71"/></text:p>
          </table:table-cell>
          <table:table-cell table:style-name="表格21.A3" office:value-type="string">
            <text:p text:style-name="Standard" loext:marker-style-name="T71"><text:span text:style-name="T71">AB</text:span><text:span text:style-name="T73">+</text:span></text:p>
          </table:table-cell>
          <table:table-cell table:style-name="表格21.A3" office:value-type="string">
            <text:p text:style-name="Standard" loext:marker-style-name="T71"><text:span text:style-name="T71">*</text:span><text:span text:style-name="T71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1"><text:span text:style-name="T71">C</text:span><text:span text:style-name="T71"/></text:p>
          </table:table-cell>
          <table:table-cell table:style-name="表格21.A2" office:value-type="string">
            <text:p text:style-name="Standard" loext:marker-style-name="T71"><text:span text:style-name="T71">AB+C</text:span><text:span text:style-name="T71"/></text:p>
          </table:table-cell>
          <table:table-cell table:style-name="表格21.A2" office:value-type="string">
            <text:p text:style-name="Standard" loext:marker-style-name="T71"><text:span text:style-name="T71">*</text:span><text:span text:style-name="T71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1"><text:span text:style-name="T71">結束</text:span><text:span text:style-name="T71"/></text:p>
          </table:table-cell>
          <table:table-cell table:style-name="表格21.A3" office:value-type="string">
            <text:p text:style-name="Standard" loext:marker-style-name="T71"><text:span text:style-name="T71">AB+C*</text:span><text:span text:style-name="T71"/></text:p>
          </table:table-cell>
          <table:table-cell table:style-name="表格21.A3" office:value-type="string">
            <text:p text:style-name="Standard" loext:marker-style-name="T71"><text:span text:style-name="T71">（Pop *）</text:span><text:span text:style-name="T71"/>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5" loext:marker-style-name="T140"><text:span text:style-name="T140">★ 答案：AB+C*</text:span><text:span text:style-name="T140"/></text:p>
          </table:table-cell>
          <table:covered-table-cell/>
          <table:covered-table-cell/>
        </table:table-row>
      </table:table>
      <text:p text:style-name="P8"/>
      <text:p text:style-name="P32" loext:marker-style-name="T121"><text:span text:style-name="T120">題目 </text:span><text:span text:style-name="T124">3</text:span><text:span text:style-name="T120">：</text:span><text:span text:style-name="T125">A+B*C-D</text:span>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2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2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2.A2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2.A2" office:value-type="string">
            <text:p text:style-name="Standard" loext:marker-style-name="T71"><text:span text:style-name="T71">（空）</text:span><text:span text:style-name="T71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1"><text:span text:style-name="T71">+</text:span><text:span text:style-name="T71"/></text:p>
          </table:table-cell>
          <table:table-cell table:style-name="表格22.A3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2.A3" office:value-type="string">
            <text:p text:style-name="Standard" loext:marker-style-name="T71"><text:span text:style-name="T71">+</text:span><text:span text:style-name="T71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1"><text:span text:style-name="T71">B</text:span><text:span text:style-name="T71"/></text:p>
          </table:table-cell>
          <table:table-cell table:style-name="表格22.A2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2.A2" office:value-type="string">
            <text:p text:style-name="Standard" loext:marker-style-name="T71"><text:span text:style-name="T71">+</text:span><text:span text:style-name="T71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1"><text:span text:style-name="T71">*</text:span><text:span text:style-name="T71"/></text:p>
          </table:table-cell>
          <table:table-cell table:style-name="表格22.A3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2.A3" office:value-type="string">
            <text:p text:style-name="Standard" loext:marker-style-name="T71"><text:span text:style-name="T72">+ * </text:span><text:span text:style-name="T71"><text:s/>（</text:span><text:span text:style-name="T91">* &gt; +，直接放</text:span><text:span text:style-name="T71">）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1"><text:span text:style-name="T71">C</text:span><text:span text:style-name="T71"/></text:p>
          </table:table-cell>
          <table:table-cell table:style-name="表格22.A2" office:value-type="string">
            <text:p text:style-name="Standard" loext:marker-style-name="T71"><text:span text:style-name="T71">ABC</text:span><text:span text:style-name="T71"/></text:p>
          </table:table-cell>
          <table:table-cell table:style-name="表格22.A2" office:value-type="string">
            <text:p text:style-name="Standard" loext:marker-style-name="T72"><text:span text:style-name="T72">+ *</text:span><text:span text:style-name="T72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1"><text:span text:style-name="T71">-</text:span><text:span text:style-name="T71"/></text:p>
          </table:table-cell>
          <table:table-cell table:style-name="表格22.A3" office:value-type="string">
            <text:p text:style-name="Standard" loext:marker-style-name="T71"><text:span text:style-name="T71">ABC*+</text:span><text:span text:style-name="T71"/></text:p>
          </table:table-cell>
          <table:table-cell table:style-name="表格22.A3" office:value-type="string">
            <text:p text:style-name="Standard" loext:marker-style-name="T71"><text:span text:style-name="T71">- <text:s/>（</text:span><text:span text:style-name="T172">- ≤ *，先 Pop *</text:span><text:span text:style-name="T71">；</text:span><text:span text:style-name="T105">- ≤ +，再 Pop +</text:span><text:span text:style-name="T71">；</text:span><text:span text:style-name="T189">最後 Push -</text:span><text:span text:style-name="T71">）(</text:span><text:span text:style-name="T104">當看到新的運算子時：如果 Stack 裡面的運算子比它更早算就：先拿出來輸出</text:span><text:span text:style-name="T71">)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1"><text:span text:style-name="T71">D</text:span><text:span text:style-name="T71"/></text:p>
          </table:table-cell>
          <table:table-cell table:style-name="表格22.A2" office:value-type="string">
            <text:p text:style-name="Standard" loext:marker-style-name="T71"><text:span text:style-name="T71">ABC*+D</text:span><text:span text:style-name="T71"/></text:p>
          </table:table-cell>
          <table:table-cell table:style-name="表格22.A2" office:value-type="string">
            <text:p text:style-name="Standard" loext:marker-style-name="T71"><text:span text:style-name="T71">-</text:span><text:span text:style-name="T71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1"><text:span text:style-name="T71">結束</text:span><text:span text:style-name="T71"/></text:p>
          </table:table-cell>
          <table:table-cell table:style-name="表格22.A3" office:value-type="string">
            <text:p text:style-name="Standard" loext:marker-style-name="T71"><text:span text:style-name="T71">ABC*+D-</text:span><text:span text:style-name="T71"/></text:p>
          </table:table-cell>
          <table:table-cell table:style-name="表格22.A3" office:value-type="string">
            <text:p text:style-name="Standard" loext:marker-style-name="T71"><text:span text:style-name="T71">（Pop -）</text:span><text:span text:style-name="T71"/>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5" loext:marker-style-name="T140"><text:span text:style-name="T140">★ 答案：ABC*+D-</text:span><text:span text:style-name="T140"/></text:p>
          </table:table-cell>
          <table:covered-table-cell/>
          <table:covered-table-cell/>
        </table:table-row>
      </table:table>
      <text:p text:style-name="P8"/>
      <text:p text:style-name="P32" loext:marker-style-name="T121"><text:span text:style-name="T120">題目 </text:span><text:span text:style-name="T124">4</text:span><text:span text:style-name="T120">：</text:span><text:span text:style-name="T125">(A+B)*(C-D)</text:span>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3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3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1"><text:span text:style-name="T71">(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（空）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(</text:span><text:span text:style-name="T71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(</text:span><text:span text:style-name="T71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1"><text:span text:style-name="T71">+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( +</text:span><text:span text:style-name="T71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1"><text:span text:style-name="T71">B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( +</text:span><text:span text:style-name="T71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1"><text:span text:style-name="T71">)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AB+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（空）</text:span><text:span text:style-name="T71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1"><text:span text:style-name="T71">*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AB+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*</text:span><text:span text:style-name="T71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1"><text:span text:style-name="T71">(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AB+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* (</text:span><text:span text:style-name="T71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1"><text:span text:style-name="T71">C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AB+C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* (</text:span><text:span text:style-name="T71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1"><text:span text:style-name="T71">-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AB+C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* ( - <text:s/></text:span><text:span text:style-name="T129">注意此處：Stack 頂端根本不是 *</text:span><text:span text:style-name="T190">(不然我還以為依照規則4，當看到新的運算子時，如果 Stack 裡面的運算子比它更早算就先拿Stack 裡面的運算子來輸出)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1"><text:span text:style-name="T71">D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AB+CD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* ( -</text:span><text:span text:style-name="T71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1"><text:span text:style-name="T71">)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1">AB+CD-</text:span><text:span text:style-name="T71"/></text:p>
          </table:table-cell>
          <table:table-cell table:style-name="表格23.A2" office:value-type="string">
            <text:p text:style-name="Standard" loext:marker-style-name="T71"><text:span text:style-name="T73">* </text:span><text:span text:style-name="T71"><text:s text:c="2"/>← </text:span><text:span text:style-name="T191">Pop 到 (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1"><text:span text:style-name="T71">結束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AB+CD-*</text:span><text:span text:style-name="T71"/></text:p>
          </table:table-cell>
          <table:table-cell table:style-name="表格23.A3" office:value-type="string">
            <text:p text:style-name="Standard" loext:marker-style-name="T71"><text:span text:style-name="T71">（Pop *）</text:span><text:span text:style-name="T71"/></text:p>
          </table:table-cell>
        </table:table-row>
        <text:soft-page-break/>
        <table:table-row table:style-name="表格23.1">
          <table:table-cell table:style-name="表格23.A14" table:number-columns-spanned="3" office:value-type="string">
            <text:p text:style-name="P5" loext:marker-style-name="T140"><text:span text:style-name="T140">★ 答案：AB+CD-*</text:span><text:span text:style-name="T140"/></text:p>
          </table:table-cell>
          <table:covered-table-cell/>
          <table:covered-table-cell/>
        </table:table-row>
      </table:table>
      <text:p text:style-name="P8"/>
      <text:p text:style-name="P32" loext:marker-style-name="T121"><text:span text:style-name="T120">題目 </text:span><text:span text:style-name="T124">5</text:span><text:span text:style-name="T120">：</text:span><text:span text:style-name="T125">A+B*(C-D)/E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4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4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（空）</text:span><text:span text:style-name="T71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1"><text:span text:style-name="T71">+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A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+</text:span><text:span text:style-name="T71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1"><text:span text:style-name="T71">B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+</text:span><text:span text:style-name="T71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1"><text:span text:style-name="T71">*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+ * <text:s/>（</text:span><text:span text:style-name="T91">* &gt; +，直接放</text:span><text:span text:style-name="T71">）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1"><text:span text:style-name="T71">(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AB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+ * (</text:span><text:span text:style-name="T71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1"><text:span text:style-name="T71">C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ABC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+ * (</text:span><text:span text:style-name="T71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1"><text:span text:style-name="T71">-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ABC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+ * ( -</text:span><text:span text:style-name="T71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1"><text:span text:style-name="T71">D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ABCD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+ * ( -</text:span><text:span text:style-name="T71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1"><text:span text:style-name="T71">)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ABCD-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+ * <text:s text:c="2"/>←</text:span><text:span text:style-name="T191"> Pop 到 (</text:span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1"><text:span text:style-name="T71">/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ABCD-*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讀到 / </text:span><text:span text:style-name="T72">此時 Stack頂端是 *</text:span><text:span text:style-name="T71"><text:line-break/><text:line-break/></text:span><text:span text:style-name="T154">/ 與 * 同優先權 → 先 Pop *</text:span><text:span text:style-name="T71"><text:line-break/><text:line-break/></text:span><text:span text:style-name="T106">此時新的 Stack頂端變成 +</text:span><text:span text:style-name="T71"><text:line-break/><text:line-break/></text:span><text:span text:style-name="T104">/ 的優先權高於 + → Push /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1"><text:span text:style-name="T71">E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ABCD-*E</text:span><text:span text:style-name="T71"/></text:p>
          </table:table-cell>
          <table:table-cell table:style-name="表格24.A2" office:value-type="string">
            <text:p text:style-name="Standard" loext:marker-style-name="T71"><text:span text:style-name="T71">+ /</text:span><text:span text:style-name="T71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1"><text:span text:style-name="T71">結束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ABCD-*E/+</text:span><text:span text:style-name="T71"/></text:p>
          </table:table-cell>
          <table:table-cell table:style-name="表格24.A3" office:value-type="string">
            <text:p text:style-name="Standard" loext:marker-style-name="T71"><text:span text:style-name="T71">（Pop /，再 Pop +）</text:span><text:span text:style-name="T71"/>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5" loext:marker-style-name="T140"><text:span text:style-name="T140">★ 答案：ABCD-*E/+</text:span><text:span text:style-name="T140"/></text:p>
          </table:table-cell>
          <table:covered-table-cell/>
          <table:covered-table-cell/>
        </table:table-row>
      </table:table>
      <text:p text:style-name="P10"/>
      <text:h text:style-name="P12" text:outline-level="2" loext:marker-style-name="T31"><text:span text:style-name="T30">常見陷阱：</text:span><text:span text:style-name="T33">同優先權的左結合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7" loext:marker-style-name="T24"><text:span text:style-name="T24">題目：A-B+C</text:span><text:span text:style-name="T24"/></text:p>
            <text:p text:style-name="P39" loext:marker-style-name="T166"><text:span text:style-name="T166">❌ 錯誤答案：ABC+-</text:span><text:span text:style-name="T166"/></text:p>
            <text:p text:style-name="P38" loext:marker-style-name="T139"><text:span text:style-name="T139">✅ </text:span><text:span text:style-name="T141">正確答案：AB-C+</text:span></text:p>
            <text:p text:style-name="P9" loext:marker-style-name="T47"><text:span text:style-name="T46">原因：</text:span><text:span text:style-name="T65">+ </text:span><text:span text:style-name="T46">和 </text:span><text:span text:style-name="T65">- </text:span><text:span text:style-name="T46">優先權相同，採左結合，計算順序為 </text:span><text:span text:style-name="T65">(A-B)+C</text:span><text:span text:style-name="T46">。 </text:span><text:span text:style-name="T82">遇到 </text:span><text:span text:style-name="T87">+ </text:span><text:span text:style-name="T82">時，</text:span><text:span text:style-name="T87">Stack </text:span><text:span text:style-name="T82">頂端是 </text:span><text:span text:style-name="T87">-</text:span><text:span text:style-name="T82">，兩者優先權相同</text:span><text:span text:style-name="T46">，</text:span><text:span text:style-name="T186">必須先 </text:span><text:span text:style-name="T187">Pop -</text:span><text:span text:style-name="T186">，再 </text:span><text:span text:style-name="T187">Push +</text:span><text:span text:style-name="T46">。</text:span></text:p>
          </table:table-cell>
        </table:table-row>
      </table:table>
      <text:p text:style-name="Standard"/>
      <text:h text:style-name="P14" text:outline-level="1" loext:marker-style-name="T13"><text:span text:style-name="T12">第七部分：</text:span><text:span text:style-name="T14">Prefix </text:span><text:span text:style-name="T15">求值</text:span><text:span text:style-name="T12"> 與</text:span><text:span text:style-name="T16"> </text:span><text:span text:style-name="T17">Postfix ↔ Tree </text:span><text:span text:style-name="T16">互轉</text:span></text:h>
      <text:p text:style-name="P2"/>
      <text:h text:style-name="P12" text:outline-level="2" loext:marker-style-name="T31"><text:span text:style-name="T31">Prefix Stack </text:span><text:span text:style-name="T30">求值</text:span></text:h>
      <text:p text:style-name="P25" loext:marker-style-name="T47"><text:span text:style-name="T152">Prefix</text:span><text:span text:style-name="T150">（前置式）與 </text:span><text:span text:style-name="T152">Postfix </text:span><text:span text:style-name="T150">的差別在於讀取方向</text:span><text:span text:style-name="T46">：</text:span><text:span text:style-name="T130">Postfix </text:span><text:span text:style-name="T128">從左往右，</text:span><text:span text:style-name="T130">Prefix </text:span><text:span text:style-name="T128">從右往左</text:span><text:span text:style-name="T46">。</text:span></text:p>
      <text:p text:style-name="P3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" loext:marker-style-name="T21"><text:span text:style-name="T29">Prefix Stack </text:span><text:span text:style-name="T20">計算規則</text:span></text:p>
            <text:p text:style-name="P39" loext:marker-style-name="T47"><text:span text:style-name="T65">① </text:span><text:span text:style-name="T102">從右往左讀取每個符號</text:span></text:p>
            <text:p text:style-name="P36" loext:marker-style-name="T47"><text:span text:style-name="T65">② </text:span><text:span text:style-name="T48">看到 運算元 </text:span><text:span text:style-name="T46">→ </text:span><text:span text:style-name="T95">Push </text:span><text:span text:style-name="T103">進 </text:span><text:span text:style-name="T95">Stack</text:span></text:p>
            <text:p text:style-name="P37" loext:marker-style-name="T47"><text:span text:style-name="T65">③ </text:span><text:span text:style-name="T51">看到 運算子</text:span><text:span text:style-name="T46"> → </text:span><text:span text:style-name="T87">Pop </text:span><text:span text:style-name="T82">兩個值，計算（先 </text:span><text:span text:style-name="T87">Pop </text:span><text:span text:style-name="T82">的是左邊，後 </text:span><text:span text:style-name="T87">Pop </text:span><text:span text:style-name="T82">的是右邊）</text:span><text:span text:style-name="T46">，</text:span><text:span text:style-name="T65">Push </text:span><text:span text:style-name="T46">結果</text:span></text:p>
            <text:p text:style-name="P31" loext:marker-style-name="T194"><text:span text:style-name="T192">⚠️ </text:span><text:span text:style-name="T193">注意：</text:span><text:span text:style-name="T192">Prefix </text:span><text:span text:style-name="T193">的 </text:span><text:span text:style-name="T192">Pop </text:span><text:span text:style-name="T193">順序與 </text:span><text:span text:style-name="T192">Postfix </text:span><text:span text:style-name="T193">相反！</text:span></text:p>
          </table:table-cell>
        </table:table-row>
      </table:table>
      <text:p text:style-name="P8"/>
      <text:p text:style-name="P25" loext:marker-style-name="T24"><text:span text:style-name="T24">範例：+*23 4（代表 (2×3)+4 = 10）</text:span><text:span text:style-name="T24"/></text:p>
      <text:p text:style-name="P11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Standard" loext:marker-style-name="T6"><text:span text:style-name="T5">符號（從右到左）</text:span><text:span text:style-name="T6"/></text:p>
          </table:table-cell>
          <table:table-cell table:style-name="表格27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27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1"><text:span text:style-name="T78">4</text:span><text:span text:style-name="T62">（最右）</text:span></text:p>
          </table:table-cell>
          <table:table-cell table:style-name="表格27.A2" office:value-type="string">
            <text:p text:style-name="Standard" loext:marker-style-name="T61"><text:span text:style-name="T78">Push 4</text:span><text:span text:style-name="T61"/></text:p>
          </table:table-cell>
          <table:table-cell table:style-name="表格27.A2" office:value-type="string">
            <text:p text:style-name="Standard" loext:marker-style-name="T61"><text:span text:style-name="T78">[4]</text:span><text:span text:style-name="T61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61"><text:span text:style-name="T78">3</text:span><text:span text:style-name="T61"/></text:p>
          </table:table-cell>
          <table:table-cell table:style-name="表格27.A3" office:value-type="string">
            <text:p text:style-name="Standard" loext:marker-style-name="T61"><text:span text:style-name="T78">Push 3</text:span><text:span text:style-name="T61"/></text:p>
          </table:table-cell>
          <table:table-cell table:style-name="表格27.A3" office:value-type="string">
            <text:p text:style-name="Standard" loext:marker-style-name="T61"><text:span text:style-name="T78">[4, 3]</text:span><text:span text:style-name="T61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1"><text:span text:style-name="T78">2</text:span><text:span text:style-name="T61"/></text:p>
          </table:table-cell>
          <table:table-cell table:style-name="表格27.A2" office:value-type="string">
            <text:p text:style-name="Standard" loext:marker-style-name="T61"><text:span text:style-name="T78">Push 2</text:span><text:span text:style-name="T61"/></text:p>
          </table:table-cell>
          <table:table-cell table:style-name="表格27.A2" office:value-type="string">
            <text:p text:style-name="Standard" loext:marker-style-name="T61"><text:span text:style-name="T78">[4, 3, 2]</text:span><text:span text:style-name="T61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61"><text:span text:style-name="T78">*</text:span><text:span text:style-name="T61"/></text:p>
          </table:table-cell>
          <table:table-cell table:style-name="表格27.A3" office:value-type="string">
            <text:p text:style-name="Standard" loext:marker-style-name="T61"><text:span text:style-name="T107">Pop 2</text:span><text:span text:style-name="T78">, Pop 3</text:span><text:span text:style-name="T62">，計算 </text:span><text:span text:style-name="T107">2</text:span><text:span text:style-name="T78">×3=6</text:span><text:span text:style-name="T62">，</text:span><text:span text:style-name="T78">Push 6</text:span></text:p>
          </table:table-cell>
          <table:table-cell table:style-name="表格27.A3" office:value-type="string">
            <text:p text:style-name="Standard" loext:marker-style-name="T61"><text:span text:style-name="T78">[4, 6]</text:span><text:span text:style-name="T61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1"><text:span text:style-name="T78">+ </text:span><text:span text:style-name="T62">（最左）</text:span></text:p>
          </table:table-cell>
          <table:table-cell table:style-name="表格27.A2" office:value-type="string">
            <text:p text:style-name="Standard" loext:marker-style-name="T61"><text:span text:style-name="T107">Pop 6</text:span><text:span text:style-name="T78">, Pop 4</text:span><text:span text:style-name="T62">，計算 </text:span><text:span text:style-name="T107">6</text:span><text:span text:style-name="T78">+4=10</text:span><text:span text:style-name="T62">，</text:span><text:span text:style-name="T78">Push 10</text:span></text:p>
          </table:table-cell>
          <table:table-cell table:style-name="表格27.A2" office:value-type="string">
            <text:p text:style-name="Standard" loext:marker-style-name="T61"><text:span text:style-name="T78">[10]</text:span><text:span text:style-name="T61"/></text:p>
          </table:table-cell>
        </table:table-row>
        <table:table-row table:style-name="表格27.1">
          <table:table-cell table:style-name="表格27.A7" office:value-type="string">
            <text:p text:style-name="Standard" loext:marker-style-name="T137"><text:span text:style-name="T136">結果</text:span><text:span text:style-name="T137"/>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Standard" loext:marker-style-name="T137"><text:span text:style-name="T142">★ </text:span><text:span text:style-name="T136">答案 </text:span><text:span text:style-name="T142">= 10</text:span></text:p>
          </table:table-cell>
        </table:table-row>
      </table:table>
      <text:p text:style-name="P6"/>
      <text:h text:style-name="P12" text:outline-level="2" loext:marker-style-name="T31"><text:span text:style-name="T31">Postfix → Expression Tree</text:span><text:span text:style-name="T31"/></text:h>
      <text:p text:style-name="P40">我們在做什麼？</text:p>
      <text:p text:style-name="P41">Postfix 其實只是一種書寫方式，電腦容易處理。但我們需要知道原始的算式結構。</text:p>
      <text:p text:style-name="P45">例如：AB+C* 其實代表什麼？</text:p>
      <text:p text:style-name="P41">答案是：(A+B)*C</text:p>
      <text:p text:style-name="Standard"/>
      <text:p text:style-name="P43">所以這個過程的目的只有一個：從 AB+C* 恢復出 (A+B)*C</text:p>
      <text:p text:style-name="Standard"/>
      <text:p text:style-name="P51">⭐ 最重要的觀念</text:p>
      <text:p text:style-name="P44">Stack 裡放的不是字符（A、B、C、+、*），</text:p>
      <text:p text:style-name="P44">而是逐漸完成的算式。</text:p>
      <text:p text:style-name="Standard"/>
      <text:p text:style-name="P41">看這個表格，一切都清楚了：</text:p>
      <text:p text:style-name="Standard"/>
      <text:p text:style-name="P47">讀到 <text:s text:c="2"/>→ <text:s text:c="2"/>Stack 內容</text:p>
      <text:p text:style-name="P48">A <text:s text:c="2"/>→ <text:s text:c="2"/>A</text:p>
      <text:p text:style-name="P48">B <text:s text:c="2"/>→ <text:s text:c="2"/>A , B</text:p>
      <text:p text:style-name="P52">+ <text:s text:c="2"/>→ <text:s text:c="2"/>A+B</text:p>
      <text:p text:style-name="P48">C <text:s text:c="2"/>→ <text:s text:c="2"/>A+B , C</text:p>
      <text:p text:style-name="P52">* <text:s text:c="2"/>→ <text:s text:c="2"/>(A+B)*C</text:p>
      <text:p text:style-name="P41"/>
      <text:p text:style-name="Standard"><text:span text:style-name="T52">你只要想成：Stack 裡存的就是「半完成的算式」。</text:span></text:p>
      <text:p text:style-name="Standard"><text:soft-page-break/></text:p>
      <text:p text:style-name="P40">逐步理解：AB+C*</text:p>
      <text:p text:style-name="Standard"/>
      <text:p text:style-name="P46">讀到 A</text:p>
      <text:p text:style-name="P41">A 就是一個簡單的算式。放進 Stack。</text:p>
      <text:p text:style-name="P49">Stack：[A]</text:p>
      <text:p text:style-name="Standard"/>
      <text:p text:style-name="P46">讀到 B</text:p>
      <text:p text:style-name="P41">B 也是一個簡單的算式。放進 Stack。</text:p>
      <text:p text:style-name="P49">Stack：[A, B]</text:p>
      <text:p text:style-name="Standard"/>
      <text:p text:style-name="P46">讀到 +</text:p>
      <text:p text:style-name="P41">現在遇到一個運算子。運算子需要多少個東西？</text:p>
      <text:p text:style-name="P41">+ 需要兩個。所以從 Stack 拿兩個出來。</text:p>
      <text:p text:style-name="Standard"/>
      <text:p text:style-name="P42">第一次 Pop → B（最後進來的先出來）</text:p>
      <text:p text:style-name="P42">第二次 Pop → A</text:p>
      <text:p text:style-name="P41">把它們組合：A + B = (A+B)</text:p>
      <text:p text:style-name="P41">放回 Stack。</text:p>
      <text:p text:style-name="P53">Stack：[A+B]</text:p>
      <text:p text:style-name="Standard"/>
      <text:p text:style-name="P46">讀到 C</text:p>
      <text:p text:style-name="P41">C 也是一個簡單的算式。放進 Stack。</text:p>
      <text:p text:style-name="P49">Stack：[A+B, C]</text:p>
      <text:p text:style-name="Standard"/>
      <text:p text:style-name="P46">讀到 *</text:p>
      <text:p text:style-name="P41">又遇到一個運算子。* 也需要兩個。</text:p>
      <text:p text:style-name="Standard"/>
      <text:p text:style-name="P42">第一次 Pop → C</text:p>
      <text:p text:style-name="P42">第二次 Pop → A+B</text:p>
      <text:p text:style-name="P41">把它們組合：(A+B) * C = (A+B)*C</text:p>
      <text:p text:style-name="P41">放回 Stack。</text:p>
      <text:p text:style-name="P53">Stack：[A+B)*C]</text:p>
      <text:p text:style-name="Standard"/>
      <text:p text:style-name="P44">完成！Stack 裡剩下的就是原始的算式。</text:p>
      <text:p text:style-name="Standard"/>
      <text:p text:style-name="P40">為什麼先 Pop 出來的是「右邊」？</text:p>
      <text:p text:style-name="P41">因為 Stack 是 LIFO（Last In First Out）。最後進來的先出來。</text:p>
      <text:p text:style-name="Standard"/>
      <text:p text:style-name="P45">例如：AB-</text:p>
      <text:p text:style-name="P41">A 先進來，B 後進來。</text:p>
      <text:p text:style-name="P41">讀到 -，先 Pop 出 B（後進的），再 Pop 出 A（先進的）。</text:p>
      <text:p text:style-name="P54">所以結果是：A - B（✓ 正確）</text:p>
      <text:p text:style-name="Standard"/>
      <text:p text:style-name="P57">如果反過來（B - A），就完全錯了。</text:p>
      <text:p text:style-name="Standard"/>
      <text:p text:style-name="P40">從算式到樹（最後一步）</text:p>
      <text:p text:style-name="P41">現在你已經理解了 (A+B)*C 這個算式。</text:p>
      <text:p text:style-name="P41">只需要把它畫成樹就可以了。</text:p>
      <text:p text:style-name="Standard"/>
      <text:p text:style-name="P49"><text:s text:c="3"/>*</text:p>
      <text:p text:style-name="P49"><text:s text:c="2"/>/ \</text:p>
      <text:p text:style-name="P60"><text:s text:c="4"/><text:span text:style-name="T26">+ <text:s text:c="3"/>C</text:span></text:p>
      <text:p text:style-name="P50"><text:soft-page-break/><text:s/>/ \</text:p>
      <text:p text:style-name="P50">A <text:s text:c="2"/>B</text:p>
      <text:p text:style-name="Standard"/>
      <text:p text:style-name="P41">看？這棵樹就是 (A+B)*C 的視覺表示。</text:p>
      <text:p text:style-name="Standard"/>
      <text:p text:style-name="P40">記住最簡單的方式</text:p>
      <text:p text:style-name="P41">不用一開始就記樹的結構。先掌握：</text:p>
      <text:p text:style-name="Standard"/>
      <text:p text:style-name="P55">✓ 遇到字母 → 放進 Stack</text:p>
      <text:p text:style-name="P55">✓ 遇到運算子 → Pop 兩個，組合成新的算式，再放回</text:p>
      <text:p text:style-name="P56">✓ Stack 剩下的就是答案</text:p>
      <text:p text:style-name="Standard"/>
      <text:p text:style-name="P43">等你真的理解了這個過程，再去看「樹」的角度，會自然而然理解的。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" loext:marker-style-name="T24"><text:span text:style-name="T24">範例：AB+C*</text:span><text:span text:style-name="T24"/></text:p>
            <text:p text:style-name="P39" loext:marker-style-name="T47"><text:span text:style-name="T65">① </text:span><text:span text:style-name="T46">看到 </text:span><text:span text:style-name="T65">A → </text:span><text:span text:style-name="T46">建節點 </text:span><text:span text:style-name="T65">A</text:span><text:span text:style-name="T46">，</text:span><text:span text:style-name="T65">Push</text:span></text:p>
            <text:p text:style-name="P36" loext:marker-style-name="T47"><text:span text:style-name="T65">② </text:span><text:span text:style-name="T46">看到 </text:span><text:span text:style-name="T65">B → </text:span><text:span text:style-name="T46">建節點 </text:span><text:span text:style-name="T65">B</text:span><text:span text:style-name="T46">，</text:span><text:span text:style-name="T65">Push</text:span></text:p>
            <text:p text:style-name="P36" loext:marker-style-name="T47"><text:span text:style-name="T65">③ </text:span><text:span text:style-name="T46">看到 </text:span><text:span text:style-name="T65">+ → Pop B</text:span><text:span text:style-name="T46">（右子樹），</text:span><text:span text:style-name="T65">Pop A</text:span><text:span text:style-name="T46">（左子樹），建 </text:span><text:span text:style-name="T65">+ </text:span><text:span text:style-name="T46">節點，</text:span><text:span text:style-name="T65">Push </text:span><text:span text:style-name="T46">這棵小樹</text:span></text:p>
            <text:p text:style-name="P36" loext:marker-style-name="T47"><text:span text:style-name="T65">④ </text:span><text:span text:style-name="T46">看到 </text:span><text:span text:style-name="T65">C → </text:span><text:span text:style-name="T46">建節點 </text:span><text:span text:style-name="T65">C</text:span><text:span text:style-name="T46">，</text:span><text:span text:style-name="T65">Push</text:span></text:p>
            <text:p text:style-name="P37" loext:marker-style-name="T47"><text:span text:style-name="T65">⑤ </text:span><text:span text:style-name="T46">看到 </text:span><text:span text:style-name="T65">* → Pop C</text:span><text:span text:style-name="T46">（右子樹），</text:span><text:span text:style-name="T65">Pop +</text:span><text:span text:style-name="T46">樹（左子樹），建 </text:span><text:span text:style-name="T65">* </text:span><text:span text:style-name="T46">根節點</text:span></text:p>
            <text:p text:style-name="P31" loext:marker-style-name="T35"><text:span text:style-name="T34">結果：根為 </text:span><text:span text:style-name="T44">*</text:span><text:span text:style-name="T34">，左子樹為 </text:span><text:span text:style-name="T44">+</text:span><text:span text:style-name="T34">（左</text:span><text:span text:style-name="T44">A</text:span><text:span text:style-name="T34">右</text:span><text:span text:style-name="T44">B</text:span><text:span text:style-name="T34">），右子樹為 </text:span><text:span text:style-name="T44">C</text:span></text:p>
          </table:table-cell>
        </table:table-row>
      </table:table>
      <text:h text:style-name="P15" text:outline-level="1" loext:marker-style-name="T13"><text:span text:style-name="T12"/></text:h>
      <text:h text:style-name="P14" text:outline-level="1" loext:marker-style-name="T13"><text:span text:style-name="T12">第八部分：考試速記總整理</text:span></text:h>
      <text:p text:style-name="P2"/>
      <text:h text:style-name="P12" text:outline-level="2" loext:marker-style-name="T31"><text:span text:style-name="T30">六大必背考點（重要度排序）</text:span><text:span text:style-name="T31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Standard" loext:marker-style-name="T4"><text:span text:style-name="T3">重要度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考點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關鍵記憶</text:span><text:span text:style-name="T4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3"><text:span text:style-name="T79">★★★★★</text:span><text:span text:style-name="T63"/></text:p>
          </table:table-cell>
          <table:table-cell table:style-name="表格29.A2" office:value-type="string">
            <text:p text:style-name="P5" loext:marker-style-name="T63"><text:span text:style-name="T79">Postfix </text:span><text:span text:style-name="T64">用 </text:span><text:span text:style-name="T79">Stack </text:span><text:span text:style-name="T64">求值</text:span></text:p>
          </table:table-cell>
          <table:table-cell table:style-name="表格29.A2" office:value-type="string">
            <text:p text:style-name="P5" loext:marker-style-name="T63"><text:span text:style-name="T64">從左往右，運算元 </text:span><text:span text:style-name="T79">Push</text:span><text:span text:style-name="T64">，運算子 </text:span><text:span text:style-name="T79">Pop </text:span><text:span text:style-name="T64">兩個計算</text:span></text:p>
          </table:table-cell>
        </table:table-row>
        <table:table-row table:style-name="表格29.1">
          <table:table-cell table:style-name="表格29.A2" office:value-type="string">
            <text:p text:style-name="P5" loext:marker-style-name="T63"><text:span text:style-name="T79">★★★★★</text:span><text:span text:style-name="T63"/></text:p>
          </table:table-cell>
          <table:table-cell table:style-name="表格29.A2" office:value-type="string">
            <text:p text:style-name="P5" loext:marker-style-name="T63"><text:span text:style-name="T79">Infix → Postfix </text:span><text:span text:style-name="T64">轉換</text:span></text:p>
          </table:table-cell>
          <table:table-cell table:style-name="表格29.A2" office:value-type="string">
            <text:p text:style-name="P5" loext:marker-style-name="T63"><text:span text:style-name="T64">五條規則（括號、優先權、左結合）</text:span><text:span text:style-name="T63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3"><text:span text:style-name="T79">★★★★★</text:span><text:span text:style-name="T63"/></text:p>
          </table:table-cell>
          <table:table-cell table:style-name="表格29.A2" office:value-type="string">
            <text:p text:style-name="P5" loext:marker-style-name="T63"><text:span text:style-name="T79">Preorder = Prefix</text:span><text:span text:style-name="T63"/></text:p>
            <text:p text:style-name="P5" loext:marker-style-name="T63"><text:span text:style-name="T79">Inorder = Infix</text:span><text:span text:style-name="T63"/></text:p>
            <text:p text:style-name="P5" loext:marker-style-name="T63"><text:span text:style-name="T79">Postorder = Postfix</text:span><text:span text:style-name="T63"/></text:p>
          </table:table-cell>
          <table:table-cell table:style-name="表格29.A2" office:value-type="string">
            <text:p text:style-name="P5" loext:marker-style-name="T63"><text:span text:style-name="T64">走訪方式 ↔ 表示法對應</text:span><text:span text:style-name="T63"/></text:p>
          </table:table-cell>
        </table:table-row>
        <table:table-row table:style-name="表格29.1">
          <table:table-cell table:style-name="表格29.A5" office:value-type="string">
            <text:p text:style-name="P5" loext:marker-style-name="T63"><text:span text:style-name="T79">★★★★☆</text:span><text:span text:style-name="T63"/></text:p>
          </table:table-cell>
          <table:table-cell table:style-name="表格29.A5" office:value-type="string">
            <text:p text:style-name="P5" loext:marker-style-name="T63"><text:span text:style-name="T79">Expression Tree </text:span><text:span text:style-name="T64">建樹</text:span></text:p>
          </table:table-cell>
          <table:table-cell table:style-name="表格29.A5" office:value-type="string">
            <text:p text:style-name="P5" loext:marker-style-name="T63"><text:span text:style-name="T64">找最後算的運算子 </text:span><text:span text:style-name="T79">= </text:span><text:span text:style-name="T64">根節點，遞迴拆解</text:span></text:p>
          </table:table-cell>
        </table:table-row>
        <table:table-row table:style-name="表格29.1">
          <table:table-cell table:style-name="表格29.A5" office:value-type="string">
            <text:p text:style-name="P5" loext:marker-style-name="T63"><text:span text:style-name="T79">★★★★☆</text:span><text:span text:style-name="T63"/></text:p>
          </table:table-cell>
          <table:table-cell table:style-name="表格29.A5" office:value-type="string">
            <text:p text:style-name="P5" loext:marker-style-name="T63"><text:span text:style-name="T79">Prefix </text:span><text:span text:style-name="T64">用 </text:span><text:span text:style-name="T79">Stack </text:span><text:span text:style-name="T64">求值</text:span></text:p>
          </table:table-cell>
          <table:table-cell table:style-name="表格29.A5" office:value-type="string">
            <text:p text:style-name="P5" loext:marker-style-name="T63"><text:span text:style-name="T64">從右往左，先 </text:span><text:span text:style-name="T79">Pop </text:span><text:span text:style-name="T64">的是左運算元</text:span></text:p>
          </table:table-cell>
        </table:table-row>
        <table:table-row table:style-name="表格29.1">
          <table:table-cell table:style-name="表格29.A7" office:value-type="string">
            <text:p text:style-name="P5" loext:marker-style-name="T63"><text:span text:style-name="T79">★★★☆☆</text:span><text:span text:style-name="T63"/></text:p>
          </table:table-cell>
          <table:table-cell table:style-name="表格29.A7" office:value-type="string">
            <text:p text:style-name="P5" loext:marker-style-name="T63"><text:span text:style-name="T79">Postfix → Expression Tree</text:span><text:span text:style-name="T63"/></text:p>
          </table:table-cell>
          <table:table-cell table:style-name="表格29.A7" office:value-type="string">
            <text:p text:style-name="P5" loext:marker-style-name="T63"><text:span text:style-name="T64">運算元建節點 </text:span><text:span text:style-name="T79">Push</text:span><text:span text:style-name="T64">，運算子合併兩棵子樹</text:span></text:p>
          </table:table-cell>
        </table:table-row>
      </table:table>
      <text:p text:style-name="P6"/>
      <text:h text:style-name="P12" text:outline-level="2" loext:marker-style-name="T31"><text:span text:style-name="T31">Infix → Postfix </text:span><text:span text:style-name="T30">考前速記卡</text:span>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7" loext:marker-style-name="T25"><text:span text:style-name="T25">1. Operand（運算元） → 直接輸出</text:span><text:span text:style-name="T25"/></text:p>
            <text:p text:style-name="P36" loext:marker-style-name="T25"><text:span text:style-name="T25">2. <text:s/>( <text:s/>→ Push</text:span><text:span text:style-name="T25"/></text:p>
            <text:p text:style-name="P36" loext:marker-style-name="T25"><text:span text:style-name="T25">3. <text:s/>) <text:s/>→ Pop 直到 (（括號不輸出）</text:span><text:span text:style-name="T25"/></text:p>
            <text:p text:style-name="P36" loext:marker-style-name="T25"><text:span text:style-name="T25">4. Operator → Stack 頂優先 ≥ 自己 → 先 Pop，再 Push</text:span><text:span text:style-name="T25"/></text:p>
            <text:p text:style-name="P37" loext:marker-style-name="T25"><text:span text:style-name="T25">5. 讀完 → Stack 全部 Pop 輸出</text:span><text:span text:style-name="T25"/></text:p>
          </table:table-cell>
        </table:table-row>
      </table:table>
      <text:p text:style-name="P10"/>
      <text:h text:style-name="P12" text:outline-level="2" loext:marker-style-name="T31"><text:span text:style-name="T30">三種表示法互轉速查表</text:span><text:span text:style-name="T31"/>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Standard" loext:marker-style-name="T6"><text:span text:style-name="T5">表示法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算式範例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特點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求值方法</text:span><text:span text:style-name="T6"/></text:p>
          </table:table-cell>
        </table:table-row>
        <table:table-row table:style-name="表格31.1">
          <table:table-cell table:style-name="表格31.A2" office:value-type="string">
            <text:p text:style-name="Standard" loext:marker-style-name="T63"><text:span text:style-name="T79">Prefix </text:span><text:span text:style-name="T64">前置式</text:span></text:p>
          </table:table-cell>
          <table:table-cell table:style-name="表格31.A2" office:value-type="string">
            <text:p text:style-name="Standard" loext:marker-style-name="T63"><text:span text:style-name="T79">+AB</text:span><text:span text:style-name="T63"/></text:p>
          </table:table-cell>
          <table:table-cell table:style-name="表格31.A2" office:value-type="string">
            <text:p text:style-name="Standard" loext:marker-style-name="T63"><text:span text:style-name="T64">運算子在前</text:span><text:span text:style-name="T63"/></text:p>
          </table:table-cell>
          <table:table-cell table:style-name="表格31.A2" office:value-type="string">
            <text:p text:style-name="Standard" loext:marker-style-name="T63"><text:span text:style-name="T79">Stack</text:span><text:span text:style-name="T64">，從右往左讀</text:span></text:p>
          </table:table-cell>
        </table:table-row>
        <table:table-row table:style-name="表格31.1">
          <table:table-cell table:style-name="表格31.A3" office:value-type="string">
            <text:p text:style-name="Standard" loext:marker-style-name="T63"><text:span text:style-name="T79">Infix </text:span><text:span text:style-name="T64">中置式</text:span></text:p>
          </table:table-cell>
          <table:table-cell table:style-name="表格31.A3" office:value-type="string">
            <text:p text:style-name="Standard" loext:marker-style-name="T63"><text:span text:style-name="T79">A+B</text:span><text:span text:style-name="T63"/></text:p>
          </table:table-cell>
          <table:table-cell table:style-name="表格31.A3" office:value-type="string">
            <text:p text:style-name="Standard" loext:marker-style-name="T63"><text:span text:style-name="T64">人類習慣寫法，需括號</text:span><text:span text:style-name="T63"/></text:p>
          </table:table-cell>
          <table:table-cell table:style-name="表格31.A3" office:value-type="string">
            <text:p text:style-name="Standard" loext:marker-style-name="T63"><text:span text:style-name="T64">需考慮優先權</text:span><text:span text:style-name="T63"/></text:p>
          </table:table-cell>
        </table:table-row>
        <table:table-row table:style-name="表格31.1">
          <table:table-cell table:style-name="表格31.A4" office:value-type="string">
            <text:p text:style-name="Standard" loext:marker-style-name="T63"><text:span text:style-name="T79">Postfix </text:span><text:span text:style-name="T64">後置式</text:span></text:p>
          </table:table-cell>
          <table:table-cell table:style-name="表格31.A4" office:value-type="string">
            <text:p text:style-name="Standard" loext:marker-style-name="T63"><text:span text:style-name="T79">AB+</text:span><text:span text:style-name="T63"/></text:p>
          </table:table-cell>
          <table:table-cell table:style-name="表格31.A4" office:value-type="string">
            <text:p text:style-name="Standard" loext:marker-style-name="T63"><text:span text:style-name="T64">無括號，電腦最愛</text:span><text:span text:style-name="T63"/></text:p>
          </table:table-cell>
          <table:table-cell table:style-name="表格31.A4" office:value-type="string">
            <text:p text:style-name="Standard" loext:marker-style-name="T63"><text:span text:style-name="T79">Stack</text:span><text:span text:style-name="T64">，從左往右讀</text:span>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58" loext:marker-style-name="T22"><text:span text:style-name="T23">最終核心記憶句（一句話串起整章）</text:span><text:span text:style-name="T22"/></text:p>
            <text:p text:style-name="P24" loext:marker-style-name="T41"><text:span text:style-name="T40">「</text:span><text:span text:style-name="T45">Expression Tree </text:span><text:span text:style-name="T40">求值 </text:span><text:span text:style-name="T45">= Postorder </text:span><text:span text:style-name="T40">走訪 </text:span><text:span text:style-name="T45">= Postfix </text:span><text:span text:style-name="T40">計算 </text:span><text:span text:style-name="T45">= Stack</text:span><text:span text:style-name="T40">」</text:span></text:p>
            <text:p text:style-name="P59" loext:marker-style-name="T47"><text:span text:style-name="T46">只要懂這一句，整章 </text:span><text:span text:style-name="T65">Expression Tree </text:span><text:span text:style-name="T46">的題目就全部打通。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f3864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1a6b72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7b3f00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0T01:48:15</meta:creation-date>
    <meta:initial-creator>Un-named</meta:initial-creator>
    <dc:language>en-US</dc:language>
    <dc:date>2026-06-11T15:05:08.468000000</dc:date>
    <meta:editing-cycles>84</meta:editing-cycles>
    <meta:editing-duration>PT11H57M16S</meta:editing-duration>
    <meta:generator>MODA_ODF_Application_Tools/3.8.4.2$Windows_X86_64 LibreOffice_project/4fb77107d5af14329e08085efe4fa19b5633383a</meta:generator>
    <meta:document-statistic meta:table-count="32" meta:image-count="0" meta:object-count="0" meta:page-count="15" meta:paragraph-count="600" meta:word-count="3956" meta:character-count="7207" meta:non-whitespace-character-count="5913"/>
    <meta:user-defined meta:name="AppVersion">15.0000</meta:user-defined>
  </office:meta>
</office:document-meta>
</file>