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fo:background-color="transparent" style:writing-mode="page">
        <style:background-image/>
      </style:table-properties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9.5" style:family="table-row">
      <style:table-row-properties fo:background-color="transparent" fo:keep-together="auto">
        <style:background-image/>
      </style:table-row-properties>
    </style:style>
    <style:style style:name="表格49.B5" style:family="table-cell">
      <style:table-cell-properties style:vertical-align="middle" fo:background-color="#00e676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3" style:family="table-row">
      <style:table-row-properties style:min-row-height="1.177cm" fo:keep-together="auto"/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9.6" style:family="table-row">
      <style:table-row-properties style:min-row-height="1.203cm" fo:keep-together="auto"/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7.938cm"/>
    </style:style>
    <style:style style:name="表格23.B" style:family="table-column">
      <style:table-column-properties style:column-width="0.633cm"/>
    </style:style>
    <style:style style:name="表格23.C" style:family="table-column">
      <style:table-column-properties style:column-width="7.939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23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23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3.704cm"/>
    </style:style>
    <style:style style:name="表格24.B" style:family="table-column">
      <style:table-column-properties style:column-width="0.351cm"/>
    </style:style>
    <style:style style:name="表格24.C" style:family="table-column">
      <style:table-column-properties style:column-width="5.644cm"/>
    </style:style>
    <style:style style:name="表格24.D" style:family="table-column">
      <style:table-column-properties style:column-width="0.355cm"/>
    </style:style>
    <style:style style:name="表格24.E" style:family="table-column">
      <style:table-column-properties style:column-width="6.456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75pt solid #2e75b6">
        <style:background-image/>
      </style:table-cell-properties>
    </style:style>
    <style:style style:name="表格24.B1" style:family="table-cell">
      <style:table-cell-properties fo:background-color="#ffffff" fo:padding="0cm" fo:border="none">
        <style:background-image/>
      </style:table-cell-properties>
    </style:style>
    <style:style style:name="表格2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24.E1" style:family="table-cell">
      <style:table-cell-properties fo:background-color="#e0f7fa" fo:padding-left="0.212cm" fo:padding-right="0.212cm" fo:padding-top="0.141cm" fo:padding-bottom="0.141cm" fo:border="0.75pt solid #006064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5" style:family="table">
      <style:table-properties style:width="16.51cm" fo:margin-left="0.012cm" fo:margin-top="0cm" fo:margin-bottom="0cm" table:align="left" style:writing-mode="page"/>
    </style:style>
    <style:style style:name="表格65.A" style:family="table-column">
      <style:table-column-properties style:column-width="6.703cm"/>
    </style:style>
    <style:style style:name="表格65.B" style:family="table-column">
      <style:table-column-properties style:column-width="0.704cm"/>
    </style:style>
    <style:style style:name="表格65.C" style:family="table-column">
      <style:table-column-properties style:column-width="9.10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6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6" style:family="table">
      <style:table-properties style:width="16.51cm" fo:margin-left="0.012cm" fo:margin-top="0cm" fo:margin-bottom="0cm" table:align="left" style:writing-mode="page"/>
    </style:style>
    <style:style style:name="表格66.A" style:family="table-column">
      <style:table-column-properties style:column-width="7.761cm"/>
    </style:style>
    <style:style style:name="表格66.B" style:family="table-column">
      <style:table-column-properties style:column-width="0.704cm"/>
    </style:style>
    <style:style style:name="表格66.C" style:family="table-column">
      <style:table-column-properties style:column-width="8.04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66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6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7" style:family="table">
      <style:table-properties style:width="16.51cm" fo:margin-left="0.01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6e4f0" fo:padding-left="0.353cm" fo:padding-right="0.353cm" fo:padding-top="0.212cm" fo:padding-bottom="0.212cm" fo:border="0.75pt solid #1f4e79">
        <style:background-image/>
      </style:table-cell-properties>
    </style:style>
    <style:style style:name="表格68" style:family="table">
      <style:table-properties style:width="12.347cm" fo:margin-left="0.012cm" fo:margin-top="0cm" fo:margin-bottom="0cm" table:align="left" style:writing-mode="page"/>
    </style:style>
    <style:style style:name="表格68.A" style:family="table-column">
      <style:table-column-properties style:column-width="12.347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2f2" fo:padding-left="0.265cm" fo:padding-right="0.265cm" fo:padding-top="0.141cm" fo:padding-bottom="0.141cm" fo:border="0.75pt solid #2e75b6">
        <style:background-image/>
      </style:table-cell-properties>
    </style:style>
    <style:style style:name="表格69" style:family="table">
      <style:table-properties style:width="16.51cm" fo:margin-left="0.012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73" style:family="table">
      <style:table-properties style:width="16.51cm" fo:margin-left="0.012cm" fo:margin-top="0cm" fo:margin-bottom="0cm" table:align="left" style:writing-mode="page"/>
    </style:style>
    <style:style style:name="表格73.A" style:family="table-column">
      <style:table-column-properties style:column-width="16.51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e2efda" fo:padding-left="0.353cm" fo:padding-right="0.353cm" fo:padding-top="0.212cm" fo:padding-bottom="0.212cm" fo:border="0.75pt solid #375623">
        <style:background-image/>
      </style:table-cell-properties>
    </style:style>
    <style:style style:name="表格70" style:family="table">
      <style:table-properties style:width="16.51cm" fo:margin-left="0.012cm" fo:margin-top="0cm" fo:margin-bottom="0cm" table:align="left" style:writing-mode="page"/>
    </style:style>
    <style:style style:name="表格70.A" style:family="table-column">
      <style:table-column-properties style:column-width="3.351cm"/>
    </style:style>
    <style:style style:name="表格70.B" style:family="table-column">
      <style:table-column-properties style:column-width="4.763cm"/>
    </style:style>
    <style:style style:name="表格70.C" style:family="table-column">
      <style:table-column-properties style:column-width="3.175cm"/>
    </style:style>
    <style:style style:name="表格70.D" style:family="table-column">
      <style:table-column-properties style:column-width="5.22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7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7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1" style:family="table">
      <style:table-properties style:width="16.51cm" fo:margin-left="0.01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72" style:family="table">
      <style:table-properties style:width="16.51cm" fo:margin-left="0.01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3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7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f4e79" loext:opacity="100%" style:font-name="Arial" fo:font-size="11pt" officeooo:paragraph-rsid="0110c6dc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10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1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14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6pt" fo:font-weight="bold" officeooo:paragraph-rsid="00d24293" style:font-name-asian="Arial2" style:font-size-asian="16pt" style:font-weight-asian="bold" style:font-name-complex="Arial2" style:font-size-complex="16pt" style:font-weight-complex="bold"/>
    </style:style>
    <style:style style:name="P15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  <style:text-properties fo:color="#2e75b6" loext:opacity="100%" style:font-name="Arial" fo:font-size="14pt" fo:font-weight="bold" officeooo:paragraph-rsid="00d24293" style:font-name-asian="Arial2" style:font-size-asian="14pt" style:font-weight-asian="bold" style:font-name-complex="Arial2" style:font-size-complex="14pt" style:font-weight-complex="bold"/>
    </style:style>
    <style:style style:name="P17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8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margin-top="0.106cm" fo:margin-bottom="0.141cm" style:contextual-spacing="false"/>
      <style:text-properties fo:color="#595959" loext:opacity="100%" style:font-name="Arial" fo:font-size="9pt" officeooo:paragraph-rsid="00d24293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/>
      <style:text-properties fo:color="#595959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595959" loext:opacity="100%" style:font-name="Arial" fo:font-size="10pt" officeooo:paragraph-rsid="0108d14d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27" style:family="paragraph" style:parent-style-name="Standard">
      <style:paragraph-properties fo:text-align="center" style:justify-single-word="false"/>
      <style:text-properties officeooo:paragraph-rsid="004fb9a3"/>
    </style:style>
    <style:style style:name="P28" style:family="paragraph" style:parent-style-name="Standard">
      <style:paragraph-properties fo:text-align="center" style:justify-single-word="false"/>
      <style:text-properties officeooo:paragraph-rsid="00d24293"/>
    </style:style>
    <style:style style:name="P29" style:family="paragraph" style:parent-style-name="Standard">
      <style:paragraph-properties fo:margin-top="0.106cm" fo:margin-bottom="0.141cm" style:contextual-spacing="false"/>
    </style:style>
    <style:style style:name="P30" style:family="paragraph" style:parent-style-name="Standard">
      <style:paragraph-properties fo:margin-top="0.106cm" fo:margin-bottom="0.106cm" style:contextual-spacing="false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d24293" style:font-name-asian="Arial2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d24293" style:font-name-asian="Arial2" style:font-size-asian="10pt" style:font-name-complex="Arial2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d24293" fo:background-color="#ffff00" style:font-name-asian="Arial2" style:font-size-asian="10pt" style:font-name-complex="Arial2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d24293" fo:background-color="#ffd740" style:font-name-asian="Arial2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9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50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5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108d14d" style:font-name-asian="Arial2" style:font-size-asian="11pt" style:font-name-complex="Arial2" style:font-size-complex="11pt"/>
    </style:style>
    <style:style style:name="P52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top="0.106cm" fo:margin-bottom="0.141cm" style:contextual-spacing="false"/>
      <style:text-properties fo:color="#ff3d00" loext:opacity="100%" style:font-name="Arial" fo:font-size="9pt" fo:font-weight="bold" officeooo:paragraph-rsid="00d24293" fo:background-color="#64ffda" style:font-name-asian="Arial2" style:font-size-asian="9pt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officeooo:paragraph-rsid="00d24293" fo:background-color="#f50057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top="0.212cm" fo:margin-bottom="0.106cm" style:contextual-spacing="false"/>
    </style:style>
    <style:style style:name="P58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60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3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6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69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70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71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72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73" style:family="paragraph" style:parent-style-name="Standard">
      <style:text-properties officeooo:paragraph-rsid="000ee922"/>
    </style:style>
    <style:style style:name="P74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7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d24293" fo:background-color="#64ffda" style:font-name-asian="Arial2" style:font-size-asian="10pt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8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8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90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d24293" style:font-name-asian="Courier New1" style:font-size-asian="10pt" style:font-name-complex="Courier New1" style:font-size-complex="10pt"/>
    </style:style>
    <style:style style:name="P91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108d14d" style:font-name-asian="Courier New1" style:font-size-asian="10pt" style:font-name-complex="Courier New1" style:font-size-complex="10pt"/>
    </style:style>
    <style:style style:name="P92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93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94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5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02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03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04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105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0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108" style:family="paragraph" style:parent-style-name="Standard">
      <style:paragraph-properties fo:text-align="center" style:justify-single-word="false"/>
      <style:text-properties fo:color="#006064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9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0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1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112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113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d24293" style:font-name-asian="Arial2" style:font-size-asian="9pt" style:font-name-complex="Arial2" style:font-size-complex="9pt"/>
    </style:style>
    <style:style style:name="P114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19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20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10pt" officeooo:paragraph-rsid="00d24293" style:font-name-asian="Arial2" style:font-size-asian="10pt" style:font-name-complex="Arial2" style:font-size-complex="10pt"/>
    </style:style>
    <style:style style:name="P121" style:family="paragraph" style:parent-style-name="Standard">
      <style:paragraph-properties fo:text-align="center" style:justify-single-word="false"/>
      <style:text-properties fo:color="#375623" loext:opacity="100%" style:font-name="Arial" fo:font-size="10pt" officeooo:paragraph-rsid="0108d14d" style:font-name-asian="Arial2" style:font-size-asian="10pt" style:font-name-complex="Arial2" style:font-size-complex="10pt"/>
    </style:style>
    <style:style style:name="P122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3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124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125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126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127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128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129" style:family="paragraph" style:parent-style-name="Standard">
      <style:paragraph-properties fo:margin-top="0.176cm" fo:margin-bottom="0.106cm" style:contextual-spacing="false"/>
    </style:style>
    <style:style style:name="P130" style:family="paragraph" style:parent-style-name="Standard">
      <style:paragraph-properties fo:margin-top="0.141cm" fo:margin-bottom="0.106cm" style:contextual-spacing="false"/>
    </style:style>
    <style:style style:name="P131" style:family="paragraph" style:parent-style-name="Standard">
      <style:paragraph-properties fo:text-align="center" style:justify-single-word="false"/>
      <style:text-properties fo:color="#ff9100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officeooo:paragraph-rsid="00d24293"/>
    </style:style>
    <style:style style:name="P133" style:family="paragraph" style:parent-style-name="Standard">
      <style:paragraph-properties fo:margin-top="0.106cm" fo:margin-bottom="0.141cm" style:contextual-spacing="false"/>
      <style:text-properties officeooo:paragraph-rsid="00d24293"/>
    </style:style>
    <style:style style:name="P134" style:family="paragraph" style:parent-style-name="Standard">
      <style:paragraph-properties fo:margin-top="0.071cm" fo:margin-bottom="0cm" style:contextual-spacing="false"/>
      <style:text-properties officeooo:paragraph-rsid="00d24293"/>
    </style:style>
    <style:style style:name="P135" style:family="paragraph" style:parent-style-name="Standard">
      <style:paragraph-properties fo:margin-top="0.212cm" fo:margin-bottom="0.106cm" style:contextual-spacing="false"/>
      <style:text-properties officeooo:paragraph-rsid="00d24293"/>
    </style:style>
    <style:style style:name="P136" style:family="paragraph" style:parent-style-name="Standard">
      <style:paragraph-properties fo:margin-top="0.035cm" fo:margin-bottom="0cm" style:contextual-spacing="false"/>
      <style:text-properties officeooo:paragraph-rsid="00d24293"/>
    </style:style>
    <style:style style:name="P137" style:family="paragraph" style:parent-style-name="Standard">
      <style:paragraph-properties fo:margin-top="0.035cm" fo:margin-bottom="0.035cm" style:contextual-spacing="false"/>
      <style:text-properties officeooo:paragraph-rsid="00d24293"/>
    </style:style>
    <style:style style:name="P138" style:family="paragraph" style:parent-style-name="Standard">
      <style:paragraph-properties fo:margin-top="0.071cm" fo:margin-bottom="0.071cm" style:contextual-spacing="false"/>
      <style:text-properties officeooo:paragraph-rsid="00d24293"/>
    </style:style>
    <style:style style:name="P139" style:family="paragraph" style:parent-style-name="Standard">
      <style:paragraph-properties fo:margin-top="0.423cm" fo:margin-bottom="0.141cm" style:contextual-spacing="false"/>
      <style:text-properties officeooo:paragraph-rsid="00d24293"/>
    </style:style>
    <style:style style:name="P140" style:family="paragraph" style:parent-style-name="Standard">
      <style:paragraph-properties fo:margin-top="0.071cm" fo:margin-bottom="0cm" style:contextual-spacing="false"/>
      <style:text-properties officeooo:paragraph-rsid="0108d14d"/>
    </style:style>
    <style:style style:name="P141" style:family="paragraph" style:parent-style-name="Standard">
      <style:paragraph-properties fo:margin-top="0.071cm" fo:margin-bottom="0.071cm" style:contextual-spacing="false"/>
      <style:text-properties officeooo:paragraph-rsid="0108d14d"/>
    </style:style>
    <style:style style:name="P142" style:family="paragraph" style:parent-style-name="Standard">
      <style:paragraph-properties fo:margin-top="0.106cm" fo:margin-bottom="0.141cm" style:contextual-spacing="false"/>
      <style:text-properties officeooo:paragraph-rsid="0108d14d"/>
    </style:style>
    <style:style style:name="P143" style:family="paragraph" style:parent-style-name="Standard">
      <style:paragraph-properties fo:margin-top="0.212cm" fo:margin-bottom="0.106cm" style:contextual-spacing="false"/>
      <style:text-properties officeooo:paragraph-rsid="0108d14d"/>
    </style:style>
    <style:style style:name="P144" style:family="paragraph" style:parent-style-name="Standard">
      <style:paragraph-properties fo:margin-top="0.071cm" fo:margin-bottom="0cm" style:contextual-spacing="false"/>
    </style:style>
    <style:style style:name="P14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6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147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148" style:family="paragraph" style:parent-style-name="List_20_Paragraph" style:list-style-name="WWNum3">
      <style:paragraph-properties fo:margin-top="0.071cm" fo:margin-bottom="0.071cm" style:contextual-spacing="false"/>
    </style:style>
    <style:style style:name="P149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150" style:family="paragraph" style:parent-style-name="Standard">
      <style:paragraph-properties fo:text-align="center" style:justify-single-word="false"/>
      <style:text-properties style:font-name="Arial" fo:font-size="10pt" officeooo:paragraph-rsid="000ee922" fo:background-color="#ffff00" style:font-name-asian="Arial2" style:font-size-asian="10pt" style:font-name-complex="Arial2" style:font-size-complex="10pt"/>
    </style:style>
    <style:style style:name="P151" style:family="paragraph" style:parent-style-name="Standard">
      <style:paragraph-properties fo:text-align="center" style:justify-single-word="false"/>
      <style:text-properties style:font-name="Arial" fo:font-size="10pt" officeooo:paragraph-rsid="01154385" style:font-name-asian="Arial2" style:font-size-asian="10pt" style:font-name-complex="Arial2" style:font-size-complex="10pt"/>
    </style:style>
    <style:style style:name="P152" style:family="paragraph" style:parent-style-name="Standard">
      <style:paragraph-properties fo:text-align="center" style:justify-single-word="false"/>
      <style:text-properties style:font-name="Arial" fo:font-size="10pt" officeooo:paragraph-rsid="0117c202" style:font-name-asian="Arial2" style:font-size-asian="10pt" style:font-name-complex="Arial2" style:font-size-complex="10pt"/>
    </style:style>
    <style:style style:name="P153" style:family="paragraph" style:parent-style-name="Standard">
      <style:paragraph-properties fo:text-align="center" style:justify-single-word="false"/>
      <style:text-properties style:font-name="Arial" fo:font-size="10pt" officeooo:paragraph-rsid="0119efb1" style:font-name-asian="Arial2" style:font-size-asian="10pt" style:font-name-complex="Arial2" style:font-size-complex="10pt"/>
    </style:style>
    <style:style style:name="P154" style:family="paragraph" style:parent-style-name="Standard">
      <style:paragraph-properties fo:text-align="center" style:justify-single-word="false"/>
      <style:text-properties fo:color="#ff1744" loext:opacity="100%"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155" style:family="paragraph" style:parent-style-name="Standard" style:list-style-name="L1">
      <style:paragraph-properties fo:margin-top="0.106cm" fo:margin-bottom="0.106cm" style:contextual-spacing="false"/>
      <style:text-properties officeooo:paragraph-rsid="011c14ac"/>
    </style:style>
    <style:style style:name="P156" style:family="paragraph" style:parent-style-name="Standard" style:list-style-name="L1">
      <style:paragraph-properties fo:margin-top="0.106cm" fo:margin-bottom="0.106cm" style:contextual-spacing="false"/>
      <style:text-properties officeooo:paragraph-rsid="011e67ab"/>
    </style:style>
    <style:style style:name="P157" style:family="paragraph" style:parent-style-name="Standard">
      <style:paragraph-properties fo:text-align="center" style:justify-single-word="false"/>
      <style:text-properties officeooo:paragraph-rsid="000ee922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3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8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9" style:family="text">
      <style:text-properties style:font-name="Arial" fo:font-size="10pt" style:font-name-asian="Arial2" style:font-size-asian="10pt" style:font-name-complex="Arial2" style:font-size-complex="10pt"/>
    </style:style>
    <style:style style:name="T10" style:family="text">
      <style:text-properties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1" style:family="text">
      <style:text-properties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5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16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17" style:family="text">
      <style:text-properties fo:background-color="#ffff00" loext:char-shading-value="0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1b5e20" loext:char-shading-value="0" style:font-weight-asian="bold" style:font-weight-complex="bold"/>
    </style:style>
    <style:style style:name="T2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transparent" loext:char-shading-value="0" style:font-weight-asian="bold" style:font-weight-complex="bold"/>
    </style:style>
    <style:style style:name="T26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7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8" style:family="text">
      <style:text-properties fo:color="#18ffff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76ff03" loext:opacity="100%"/>
    </style:style>
    <style:style style:name="T32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33" style:family="text">
      <style:text-properties fo:color="#76ff03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34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3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3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8" style:family="text">
      <style:text-properties fo:color="#76ff03" loext:opacity="100%" fo:font-weight="bold" fo:background-color="#1a237e" loext:char-shading-value="0" style:font-weight-asian="bold" style:font-weight-complex="bold"/>
    </style:style>
    <style:style style:name="T39" style:family="text">
      <style:text-properties fo:color="#76ff03" loext:opacity="100%" fo:background-color="#000000" loext:char-shading-value="0"/>
    </style:style>
    <style:style style:name="T40" style:family="text">
      <style:text-properties fo:color="#ff3d00" loext:opacity="100%" fo:background-color="#64ffda" loext:char-shading-value="0"/>
    </style:style>
    <style:style style:name="T4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2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43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44" style:family="text">
      <style:text-properties fo:color="#ff3d00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ff3d00" loext:opacity="100%" fo:background-color="#ffff00" loext:char-shading-value="0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51" style:family="text">
      <style:text-properties fo:color="#ffd740" loext:opacity="100%" style:font-name="Arial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52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54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55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6" style:family="text">
      <style:text-properties fo:color="#ff9100" loext:opacity="100%" fo:background-color="#ffff00" loext:char-shading-value="0"/>
    </style:style>
    <style:style style:name="T57" style:family="text">
      <style:text-properties fo:color="#ff9100" loext:opacity="100%" fo:background-color="#3d5afe" loext:char-shading-value="0"/>
    </style:style>
    <style:style style:name="T58" style:family="text">
      <style:text-properties fo:color="#ff9100" loext:opacity="100%" fo:font-size="18pt" fo:font-weight="bold" officeooo:rsid="00f8e799" fo:background-color="#ffff00" loext:char-shading-value="0" style:font-size-asian="18pt" style:font-weight-asian="bold" style:font-size-complex="18pt" style:font-weight-complex="bold"/>
    </style:style>
    <style:style style:name="T59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60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61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62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3" style:family="text">
      <style:text-properties fo:color="#c6ff00" loext:opacity="100%" fo:background-color="#d500f9" loext:char-shading-value="0"/>
    </style:style>
    <style:style style:name="T64" style:family="text">
      <style:text-properties fo:color="#c6ff00" loext:opacity="100%" fo:background-color="#ff1744" loext:char-shading-value="0"/>
    </style:style>
    <style:style style:name="T65" style:family="text">
      <style:text-properties fo:background-color="#00e676" loext:char-shading-value="0"/>
    </style:style>
    <style:style style:name="T66" style:family="text">
      <style:text-properties fo:background-color="#ffd740" loext:char-shading-value="0"/>
    </style:style>
    <style:style style:name="T67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68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69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0" style:family="text">
      <style:text-properties fo:color="#c00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72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73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74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5" style:family="text">
      <style:text-properties fo:color="#ffff00" loext:opacity="100%" style:font-name="Arial" fo:font-size="10pt" fo:font-weight="bold" fo:background-color="#ffab40" loext:char-shading-value="0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font-weight="bold" fo:background-color="#ffd740" loext:char-shading-value="0" style:font-weight-asian="bold" style:font-weight-complex="bold"/>
    </style:style>
    <style:style style:name="T77" style:family="text">
      <style:text-properties fo:font-weight="bold" fo:background-color="#ff9100" loext:char-shading-value="0" style:font-weight-asian="bold" style:font-weight-complex="bold"/>
    </style:style>
    <style:style style:name="T78" style:family="text">
      <style:text-properties fo:font-weight="bold" fo:background-color="#00e676" loext:char-shading-value="0" style:font-weight-asian="bold" style:font-weight-complex="bold"/>
    </style:style>
    <style:style style:name="T79" style:family="text">
      <style:text-properties fo:font-weight="bold" fo:background-color="#ffff00" loext:char-shading-value="0" style:font-weight-asian="bold" style:font-weight-complex="bold"/>
    </style:style>
    <style:style style:name="T80" style:family="text">
      <style:text-properties fo:font-weight="bold" fo:background-color="#ffc400" loext:char-shading-value="0" style:font-weight-asian="bold" style:font-weight-complex="bold"/>
    </style:style>
    <style:style style:name="T81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2" style:family="text">
      <style:text-properties fo:color="#375623" loext:opacity="100%" fo:font-size="9pt" officeooo:rsid="00f8e799" style:font-size-asian="9pt" style:font-size-complex="9pt"/>
    </style:style>
    <style:style style:name="T83" style:family="text">
      <style:text-properties fo:background-color="#c6ff00" loext:char-shading-value="0"/>
    </style:style>
    <style:style style:name="T84" style:family="text">
      <style:text-properties fo:background-color="#ff9100" loext:char-shading-value="0"/>
    </style:style>
    <style:style style:name="T85" style:family="text">
      <style:text-properties fo:background-color="#18ffff" loext:char-shading-value="0"/>
    </style:style>
    <style:style style:name="T86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87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88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89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90" style:family="text">
      <style:text-properties fo:background-color="#76ff03" loext:char-shading-value="0"/>
    </style:style>
    <style:style style:name="T9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92" style:family="text">
      <style:text-properties officeooo:rsid="00d4e1b9"/>
    </style:style>
    <style:style style:name="T93" style:family="text">
      <style:text-properties fo:color="#ffc400" loext:opacity="100%" style:font-name="Arial" fo:font-size="11pt" fo:font-weight="bold" fo:background-color="#2979ff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5" style:family="text">
      <style:text-properties fo:color="#ff4081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6" style:family="text">
      <style:text-properties officeooo:rsid="00f8e799"/>
    </style:style>
    <style:style style:name="T97" style:family="text">
      <style:text-properties fo:background-color="#64ffda" loext:char-shading-value="0"/>
    </style:style>
    <style:style style:name="T98" style:family="text">
      <style:text-properties fo:background-color="#1a237e" loext:char-shading-value="0"/>
    </style:style>
    <style:style style:name="T99" style:family="text">
      <style:text-properties fo:background-color="#1a237e" loext:char-shading-value="0"/>
    </style:style>
    <style:style style:name="T100" style:family="text">
      <style:text-properties fo:background-color="#000000" loext:char-shading-value="0"/>
    </style:style>
    <style:style style:name="T101" style:family="text">
      <style:text-properties fo:background-color="#000000" loext:char-shading-value="0"/>
    </style:style>
    <style:style style:name="T102" style:family="text">
      <style:text-properties fo:color="#ffea00" loext:opacity="100%" fo:font-weight="bold" fo:background-color="transparent" loext:char-shading-value="0" style:font-weight-asian="bold" style:font-weight-complex="bold"/>
    </style:style>
    <style:style style:name="T103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ffea00" loext:opacity="100%" fo:font-weight="bold" fo:background-color="#311b92" loext:char-shading-value="0" style:font-weight-asian="bold" style:font-weight-complex="bold"/>
    </style:style>
    <style:style style:name="T105" style:family="text">
      <style:text-properties fo:color="#ffea00" loext:opacity="100%" fo:background-color="#000000" loext:char-shading-value="0"/>
    </style:style>
    <style:style style:name="T106" style:family="text">
      <style:text-properties fo:color="#ffea00" loext:opacity="100%" fo:background-color="#311b92" loext:char-shading-value="0"/>
    </style:style>
    <style:style style:name="T107" style:family="text">
      <style:text-properties fo:color="#ffea00" loext:opacity="100%"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08" style:family="text">
      <style:text-properties fo:color="#ffea00" loext:opacity="100%" style:font-name="Arial" fo:font-size="10pt" fo:font-weight="bold" fo:background-color="#ffab40" loext:char-shading-value="0" style:font-name-asian="Arial2" style:font-size-asian="10pt" style:font-weight-asian="bold" style:font-name-complex="Arial2" style:font-size-complex="10pt" style:font-weight-complex="bold"/>
    </style:style>
    <style:style style:name="T109" style:family="text">
      <style:text-properties fo:background-color="#311b92" loext:char-shading-value="0"/>
    </style:style>
    <style:style style:name="T110" style:family="text">
      <style:text-properties fo:background-color="#311b92" loext:char-shading-value="0"/>
    </style:style>
    <style:style style:name="T111" style:family="text">
      <style:text-properties fo:background-color="#b71c1c" loext:char-shading-value="0"/>
    </style:style>
    <style:style style:name="T112" style:family="text">
      <style:text-properties fo:background-color="#b71c1c" loext:char-shading-value="0"/>
    </style:style>
    <style:style style:name="T113" style:family="text">
      <style:text-properties fo:color="#f8bbd0" loext:opacity="100%" fo:background-color="#b71c1c" loext:char-shading-value="0"/>
    </style:style>
    <style:style style:name="T114" style:family="text">
      <style:text-properties fo:color="#f8bbd0" loext:opacity="100%" fo:font-weight="bold" fo:background-color="#b71c1c" loext:char-shading-value="0" style:font-weight-asian="bold" style:font-weight-complex="bold"/>
    </style:style>
    <style:style style:name="T115" style:family="text">
      <style:text-properties fo:color="#e0e0e0" loext:opacity="100%" fo:font-weight="bold" fo:background-color="#b71c1c" loext:char-shading-value="0" style:font-weight-asian="bold" style:font-weight-complex="bold"/>
    </style:style>
    <style:style style:name="T116" style:family="text">
      <style:text-properties fo:color="#f5f5f5" loext:opacity="100%" fo:font-weight="bold" fo:background-color="#b71c1c" loext:char-shading-value="0" style:font-weight-asian="bold" style:font-weight-complex="bold"/>
    </style:style>
    <style:style style:name="T117" style:family="text">
      <style:text-properties fo:color="#64ffda" loext:opacity="100%"/>
    </style:style>
    <style:style style:name="T118" style:family="text">
      <style:text-properties fo:color="#64ffda" loext:opacity="100%" fo:background-color="#1a237e" loext:char-shading-value="0"/>
    </style:style>
    <style:style style:name="T119" style:family="text">
      <style:text-properties fo:color="#64ffda" loext:opacity="100%" fo:background-color="#1a237e" loext:char-shading-value="0"/>
    </style:style>
    <style:style style:name="T120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21" style:family="text">
      <style:text-properties fo:color="#64ffda" loext:opacity="100%" style:font-name="Arial" fo:font-size="10pt" fo:background-color="#1a237e" loext:char-shading-value="0" style:font-name-asian="Arial2" style:font-size-asian="10pt" style:font-name-complex="Arial2" style:font-size-complex="10pt"/>
    </style:style>
    <style:style style:name="T122" style:family="text">
      <style:text-properties fo:color="#64ffda" loext:opacity="100%" style:font-name="Arial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9">BST・AVL・Red-Black Tree・Heap</text:p>
      <text:p text:style-name="P21">高普考・地特・關務 完整學習筆記</text:p>
      <text:p text:style-name="P26"/>
      <text:p text:style-name="Standard"/>
      <text:h text:style-name="P2" text:outline-level="1">一、三種樹結構總覽</text:h>
      <text:p text:style-name="P29"><text:span text:style-name="T1">本筆記涵蓋公職考試資料結構中最常出現的三種樹：</text:span><text:span text:style-name="T12">BST（二元搜尋樹）</text:span><text:span text:style-name="T1">、</text:span><text:span text:style-name="T12">AVL Tree（平衡二元搜尋樹）</text:span><text:span text:style-name="T1"> 以及 </text:span><text:span text:style-name="T12">Red-Black Tree（紅黑樹）</text:span><text:span text:style-name="T1">。三者都以 BST 為基礎，但各有不同的平衡策略，適用場景也不同。</text:span></text:p>
      <text:p text:style-name="P30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31">結構</text:p>
          </table:table-cell>
          <table:table-cell table:style-name="表格1.A1" office:value-type="string">
            <text:p text:style-name="P31">最擅長</text:p>
          </table:table-cell>
          <table:table-cell table:style-name="表格1.A1" office:value-type="string">
            <text:p text:style-name="P31">搜尋</text:p>
          </table:table-cell>
          <table:table-cell table:style-name="表格1.A1" office:value-type="string">
            <text:p text:style-name="P31">插入</text:p>
          </table:table-cell>
          <table:table-cell table:style-name="表格1.A1" office:value-type="string">
            <text:p text:style-name="P31">刪除</text:p>
          </table:table-cell>
          <table:table-cell table:style-name="表格1.A1" office:value-type="string">
            <text:p text:style-name="P31">最差情況</text:p>
          </table:table-cell>
        </table:table-row>
        <table:table-row table:style-name="表格1.1">
          <table:table-cell table:style-name="表格1.A2" office:value-type="string">
            <text:p text:style-name="P36">BST</text:p>
          </table:table-cell>
          <table:table-cell table:style-name="表格1.A2" office:value-type="string">
            <text:p text:style-name="P36">快速搜尋（但不穩定）</text:p>
          </table:table-cell>
          <table:table-cell table:style-name="表格1.A2" office:value-type="string">
            <text:p text:style-name="P36"><text:span text:style-name="T17">O(log n) </text:span>平均</text:p>
          </table:table-cell>
          <table:table-cell table:style-name="表格1.A2" office:value-type="string">
            <text:p text:style-name="P36"><text:span text:style-name="T17">O(log n)</text:span> 平均</text:p>
          </table:table-cell>
          <table:table-cell table:style-name="表格1.A2" office:value-type="string">
            <text:p text:style-name="P36"><text:span text:style-name="T17">O(log n) </text:span>平均</text:p>
          </table:table-cell>
          <table:table-cell table:style-name="表格1.A2" office:value-type="string">
            <text:p text:style-name="P36"><text:span text:style-name="T18">O(n) </text:span>退化</text:p>
          </table:table-cell>
        </table:table-row>
        <table:table-row table:style-name="表格1.1">
          <table:table-cell table:style-name="表格1.A3" office:value-type="string">
            <text:p text:style-name="P36">AVL</text:p>
          </table:table-cell>
          <table:table-cell table:style-name="表格1.A3" office:value-type="string">
            <text:p text:style-name="P36">查詢最快（嚴格平衡）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Red-Black Tree</text:p>
          </table:table-cell>
          <table:table-cell table:style-name="表格1.A2" office:value-type="string">
            <text:p text:style-name="P36">插入/刪除較快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</table:table-row>
        <table:table-row table:style-name="表格1.1">
          <table:table-cell table:style-name="表格1.A3" office:value-type="string">
            <text:p text:style-name="P52">Heap</text:p>
          </table:table-cell>
          <table:table-cell table:style-name="表格1.A3" office:value-type="string">
            <text:p text:style-name="P36">找最大 / 最小值</text:p>
          </table:table-cell>
          <table:table-cell table:style-name="表格1.A3" office:value-type="string">
            <text:p text:style-name="P54">O(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Hash Table</text:p>
          </table:table-cell>
          <table:table-cell table:style-name="表格1.A2" office:value-type="string">
            <text:p text:style-name="P36">快速查詢（平均）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56">O(n) 碰撞</text:p>
          </table:table-cell>
        </table:table-row>
      </table:table>
      <text:p text:style-name="P57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8">⚡ 核心差異一句話記憶</text:p>
            <text:p text:style-name="P29"><text:span text:style-name="T12">BST：</text:span><text:span text:style-name="T1">左小右大，可能退化成 O(n)</text:span></text:p>
            <text:p text:style-name="P29"><text:span text:style-name="T12">AVL：</text:span><text:span text:style-name="T2">強制平衡</text:span><text:span text:style-name="T1">（</text:span><text:span text:style-name="T3">BF 介於 -1~1</text:span><text:span text:style-name="T1">），查找最快</text:span></text:p>
            <text:p text:style-name="P29"><text:span text:style-name="T12">RBT：</text:span><text:span text:style-name="T2">用紅黑規則維持平衡</text:span><text:span text:style-name="T1">，</text:span><text:span text:style-name="T4">插入/刪除旋轉次數</text:span><text:span text:style-name="T7">少於 AVL</text:span></text:p>
            <text:p text:style-name="P29"><text:span text:style-name="T12">Heap：</text:span><text:span text:style-name="T26">不是搜尋樹</text:span><text:span text:style-name="T1">，</text:span><text:span text:style-name="T32">專門快速取出最大值或最小值</text:span></text:p>
          </table:table-cell>
        </table:table-row>
      </table:table>
      <text:p text:style-name="P30"/>
      <text:p text:style-name="Standard"/>
      <text:h text:style-name="P3" text:outline-level="1">一之一、深入理解：為什麼是 O(log n)？</text:h>
      <text:p text:style-name="P46">很多初學者看到 BST、AVL、RBT、Heap 的時間複雜度都是 O(log n)，直覺認為「應該都是每次砍掉一半吧？」這個想法非常接近核心，但需要做一個重要的區分。</text:p>
      <text:p text:style-name="P67"/>
      <text:h text:style-name="P10" text:outline-level="2">1.1 三種結構的從屬關係</text:h>
      <text:p text:style-name="P74">先釐清一個容易混淆的問題：AVL、RBT 是 BST，但<text:span text:style-name="T40"> Heap 不是 BST</text:span>。</text:p>
      <text:p text:style-name="P67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32">結構</text:p>
          </table:table-cell>
          <table:table-cell table:style-name="表格49.A1" office:value-type="string">
            <text:p text:style-name="P32">是 BST 嗎？</text:p>
          </table:table-cell>
          <table:table-cell table:style-name="表格49.A1" office:value-type="string">
            <text:p text:style-name="P32">判斷依據</text:p>
          </table:table-cell>
          <table:table-cell table:style-name="表格49.A1" office:value-type="string">
            <text:p text:style-name="P80">O(log n) 的來源</text:p>
          </table:table-cell>
        </table:table-row>
        <table:table-row table:style-name="表格49.1">
          <table:table-cell table:style-name="表格49.A2" office:value-type="string">
            <text:p text:style-name="P37">BST</text:p>
          </table:table-cell>
          <table:table-cell table:style-name="表格49.A2" office:value-type="string">
            <text:p text:style-name="P37">✓ 是（BST 本身）</text:p>
          </table:table-cell>
          <table:table-cell table:style-name="表格49.C2" office:value-type="string">
            <text:p text:style-name="P82">左 &lt; 根 &lt; 右</text:p>
          </table:table-cell>
          <table:table-cell table:style-name="表格49.A2" office:value-type="string">
            <text:p text:style-name="P152"><text:span text:style-name="T46">平衡時，每層依大小決定往左或右，每層排除約一半節點，因此 O(log n)</text:span></text:p>
          </table:table-cell>
        </table:table-row>
        <table:table-row table:style-name="表格49.1">
          <table:table-cell table:style-name="表格49.A3" office:value-type="string">
            <text:p text:style-name="P37">AVL Tree</text:p>
          </table:table-cell>
          <table:table-cell table:style-name="表格49.A3" office:value-type="string">
            <text:p text:style-name="P37">✓ 是（BST 的一種）</text:p>
          </table:table-cell>
          <table:table-cell table:style-name="表格49.A3" office:value-type="string">
            <text:p text:style-name="P37">BST 規則 + |BF| ≤ 1</text:p>
          </table:table-cell>
          <table:table-cell table:style-name="表格49.A3" office:value-type="string">
            <text:p text:style-name="P37"><text:span text:style-name="T46">BST 搜尋</text:span>＋<text:span text:style-name="T17">強制平衡</text:span>不退化，維持高度 O(log n)</text:p>
          </table:table-cell>
        </table:table-row>
        <table:table-row table:style-name="表格49.1">
          <table:table-cell table:style-name="表格49.A2" office:value-type="string">
            <text:p text:style-name="P37">Red-Black Tree</text:p>
          </table:table-cell>
          <table:table-cell table:style-name="表格49.A2" office:value-type="string">
            <text:p text:style-name="P37">✓ 是（BST 的一種）</text:p>
          </table:table-cell>
          <table:table-cell table:style-name="表格49.A2" office:value-type="string">
            <text:p text:style-name="P37">BST 規則 + 五條顏色規則</text:p>
          </table:table-cell>
          <table:table-cell table:style-name="表格49.A2" office:value-type="string">
            <text:p text:style-name="P151"><text:span text:style-name="T46">BST 搜尋</text:span>＋<text:span text:style-name="T17">顏色規則</text:span>不退化，由顏色規則保證高度 ≤ 2log(n+1)</text:p>
          </table:table-cell>
        </table:table-row>
        <table:table-row table:style-name="表格49.5">
          <table:table-cell table:style-name="表格49.A3" office:value-type="string">
            <text:p text:style-name="P150">Heap</text:p>
          </table:table-cell>
          <table:table-cell table:style-name="表格49.B5" office:value-type="string">
            <text:p text:style-name="P154">✗ 不是！</text:p>
          </table:table-cell>
          <table:table-cell table:style-name="表格49.A3" office:value-type="string">
            <text:p text:style-name="P84">只要求父 ≥ 子（或父 ≤ 子）</text:p>
          </table:table-cell>
          <table:table-cell table:style-name="表格49.A3" office:value-type="string">
            <text:p text:style-name="P153"><text:span text:style-name="T38">插入／刪除只沿著樹高移動</text:span><text:span text:style-name="T18">，而完全二元樹高度 O(log n)，</text:span><text:span text:style-name="T47">因此 O(log n)</text:span></text:p>
          </table:table-cell>
        </table:table-row>
      </table:table>
      <text:list text:style-name="L1">
        <text:list-item>
          <text:p text:style-name="P156"><text:span text:style-name="T104">Heap 是完全二元樹（Complete Binary Tree）</text:span>。</text:p>
        </text:list-item>
        <text:list-item>
          <text:p text:style-name="P156"><text:span text:style-name="T104">Heap 不是二元搜尋樹（BST）</text:span>。 ✅</text:p>
        </text:list-item>
        <text:list-item>
          <text:p text:style-name="P155"><text:span text:style-name="T116">AVL、Red-Black 都是 BST</text:span>，只是在 BST 上加入平衡規則。<text:line-break/></text:p>
        </text:list-item>
      </text:list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59">⚠️ 為什麼 Heap 不是 BST？</text:p>
            <text:p text:style-name="P46"><text:span text:style-name="T41">BST 要求「左子樹所有節點 &lt; 根 &lt; 右子樹所有節點」</text:span>，是對節點間大小關係的嚴格規定。</text:p>
            <text:p text:style-name="P46">但 <text:span text:style-name="T18">Heap 只要求「父節點 ≥（或 ≤）子節點」</text:span>，<text:span text:style-name="T52">兄弟節點之間完全沒有大小限制</text:span>。</text:p>
            <text:p text:style-name="P46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87"><text:s text:c="8"/>100</text:p>
                  <text:p text:style-name="P87"><text:s text:c="7"/>/ <text:s text:c="2"/>\</text:p>
                  <text:p text:style-name="P87"><text:s text:c="6"/>80 <text:s text:c="3"/>70 <text:s text:c="2"/>← <text:span text:style-name="T17">80 和 70 之間無大小限制（✓ Heap）</text:span></text:p>
                  <text:p text:style-name="P87"><text:s text:c="5"/>/ \</text:p>
                  <text:p text:style-name="P87"><text:s text:c="4"/>20 <text:s/>40 <text:s text:c="2"/>← <text:span text:style-name="T59">70 在根的右邊，但 70 &lt; 100</text:span>（✗ BST 規定右子必 &gt; 根不適用此位置規則）</text:p>
                </table:table-cell>
              </table:table-row>
            </table:table>
            <text:p text:style-name="P68"/>
            <text:p text:style-name="P95">結論：<text:span text:style-name="T65">BST 管的是「大小關係」</text:span>；<text:span text:style-name="T66">Heap 管的是「父子關係」</text:span>。兩者根本不同。</text:p>
          </table:table-cell>
        </table:table-row>
      </table:table>
      <text:p text:style-name="P69"/>
      <text:h text:style-name="P10" text:outline-level="2">1.2 BST / AVL / RBT 的 O(log n)：每次排除半棵樹</text:h>
      <text:p text:style-name="P46">搜尋時，<text:span text:style-name="T17">BST 的「左 &lt; 根 &lt; 右」規則</text:span>使得<text:span text:style-name="T41">每次比較都能排除整整一半的節點</text:span>，這<text:span text:style-name="T19">與二元搜尋（Binary Search）的原理完全相同</text:span>：</text:p>
      <text:p text:style-name="P67"/>
      <table:table table:name="表格52" table:style-name="表格52">
        <table:table-column table:style-name="表格52.A"/>
        <text:soft-page-break/>
        <table:table-row table:style-name="表格52.1">
          <table:table-cell table:style-name="表格52.A1" office:value-type="string">
            <text:p text:style-name="P4">搜尋 70 的過程：</text:p>
            <text:p text:style-name="P87"><text:s text:c="8"/>50 <text:s text:c="7"/>← 70 &gt; 50，<text:span text:style-name="T17">排除左半邊</text:span>（含 30, 20, 40）</text:p>
            <text:p text:style-name="P87"><text:s text:c="7"/>/ <text:s/>\</text:p>
            <text:p text:style-name="P70"><text:span text:style-name="T67"><text:s text:c="5"/>30 <text:s text:c="3"/>80 <text:s text:c="4"/>← 70 &lt; 80，</text:span><text:span text:style-name="T68">排除右半邊</text:span><text:span text:style-name="T67">（含 90）</text:span></text:p>
            <text:p text:style-name="P87"><text:s text:c="4"/>/ \ <text:s text:c="2"/>/ \</text:p>
            <text:p text:style-name="P87"><text:s text:c="3"/>20 40 70 <text:s/>90 <text:s text:c="2"/>← 找到！</text:p>
            <text:p text:style-name="P68"/>
            <text:p text:style-name="P47"><text:span text:style-name="T59">每一步都把搜尋範圍縮小一半</text:span>，故<text:span text:style-name="T46">高度 = O(log n)，搜尋 = O(log n)</text:span></text:p>
          </table:table-cell>
        </table:table-row>
      </table:table>
      <text:p text:style-name="P71"/>
      <text:p text:style-name="P70"><text:span text:style-name="T12">AVL 和 RBT 的關鍵優勢：</text:span><text:span text:style-name="T43">普通 BST 若資料有序插入</text:span><text:span text:style-name="T1">（如 1, 2, 3, 4...），</text:span><text:span text:style-name="T26">樹會退化成右斜鏈結串列，搜尋變成 </text:span><text:span text:style-name="T48">O(n)</text:span><text:span text:style-name="T1">。AVL 和 RBT </text:span><text:span text:style-name="T26">透過各自的平衡機制，保證樹不退化</text:span><text:span text:style-name="T1">，</text:span><text:span text:style-name="T61">讓「每次排除半棵樹」的前提永遠成立</text:span><text:span text:style-name="T1">，搜尋始終</text:span><text:span text:style-name="T5">維持 O(log n)</text:span><text:span text:style-name="T1">。</text:span></text:p>
      <text:p text:style-name="P67"/>
      <text:h text:style-name="P10" text:outline-level="2">1.3 Heap 的 <text:span text:style-name="T63">O(log n)：來自完全二元樹的高度</text:span></text:h>
      <text:p text:style-name="P46"><text:span text:style-name="T41">Heap 的 O(log n) 有完全不同的來源</text:span>，不是「每次排除半棵資料」，而是<text:span text:style-name="T71">「樹本身的高度剛好是 log n」</text:span>：</text:p>
      <text:p text:style-name="P67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2">操作</text:p>
          </table:table-cell>
          <table:table-cell table:style-name="表格53.A1" office:value-type="string">
            <text:p text:style-name="P32">過程</text:p>
          </table:table-cell>
          <table:table-cell table:style-name="表格53.A1" office:value-type="string">
            <text:p text:style-name="P32">為什麼是 O(log n)？</text:p>
          </table:table-cell>
        </table:table-row>
        <table:table-row table:style-name="表格53.1">
          <table:table-cell table:style-name="表格53.A2" office:value-type="string">
            <text:p text:style-name="P37">插入（Up-Heap）</text:p>
          </table:table-cell>
          <table:table-cell table:style-name="表格53.A2" office:value-type="string">
            <text:p text:style-name="P37"><text:span text:style-name="T120">新元素放最後 → 與父節點比較 → 若違規則往上交換</text:span>，重複直到合法</text:p>
          </table:table-cell>
          <table:table-cell table:style-name="表格53.A2" office:value-type="string">
            <text:p text:style-name="P37"><text:span text:style-name="T72">最多往上走「樹高」層</text:span>，樹高 = log n</text:p>
          </table:table-cell>
        </table:table-row>
        <table:table-row table:style-name="表格53.3">
          <table:table-cell table:style-name="表格53.A3" office:value-type="string">
            <text:p text:style-name="P37">刪除最大值（Down-Heap）</text:p>
          </table:table-cell>
          <table:table-cell table:style-name="表格53.A3" office:value-type="string">
            <text:p text:style-name="P157"><text:span text:style-name="T122">移除根 → 末端元素移至根 → 與較大子節點比較</text:span><text:span text:style-name="T9"> → </text:span><text:span text:style-name="T75">若違規則往下交換</text:span></text:p>
          </table:table-cell>
          <table:table-cell table:style-name="表格53.A3" office:value-type="string">
            <text:p text:style-name="P37"><text:span text:style-name="T72">最多往下走「樹高」層</text:span>，樹高 = log n</text:p>
          </table:table-cell>
        </table:table-row>
      </table:table>
      <text:p text:style-name="P67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9">💡 完全二元樹的高度為什麼是 log n？</text:p>
            <text:p text:style-name="P46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87">第 1 層：1 個節點</text:p>
                  <text:p text:style-name="P87">第 2 層：2 個節點</text:p>
                  <text:p text:style-name="P87">第 3 層：4 個節點</text:p>
                  <text:p text:style-name="P87">第 h 層：2^(h-1) 個節點</text:p>
                  <text:p text:style-name="P87">總計：2^h - 1 ≈ n <text:s/>→ <text:s/><text:span text:style-name="T73">h ≈ log₂(n)</text:span></text:p>
                </table:table-cell>
              </table:table-row>
            </table:table>
            <text:p text:style-name="P72"/>
            <text:p text:style-name="P106">因此 Up-Heap / Down-Heap 最多走 log n 步，時間複雜度為 O(log n)。</text:p>
          </table:table-cell>
        </table:table-row>
      </table:table>
      <text:p text:style-name="P69"/>
      <text:h text:style-name="P101" text:outline-level="2">1.4 <text:span text:style-name="T30">完全二元樹 ≠ BST</text:span>（重要觀念辨別）</text:h>
      <text:p text:style-name="P46"><text:span text:style-name="T41">「完全二元樹」和「BST」是兩個完全獨立的概念</text:span>，<text:span text:style-name="T46">描述的根本是不同的事情</text:span>：</text:p>
      <text:p text:style-name="P67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32">概念</text:p>
          </table:table-cell>
          <table:table-cell table:style-name="表格56.A1" office:value-type="string">
            <text:p text:style-name="P32">管什麼？</text:p>
          </table:table-cell>
          <table:table-cell table:style-name="表格56.A1" office:value-type="string">
            <text:p text:style-name="P32">規則</text:p>
          </table:table-cell>
          <table:table-cell table:style-name="表格56.A1" office:value-type="string">
            <text:p text:style-name="P32">目的</text:p>
          </table:table-cell>
        </table:table-row>
        <table:table-row table:style-name="表格56.1">
          <table:table-cell table:style-name="表格56.A2" office:value-type="string">
            <text:p text:style-name="P42">BST</text:p>
          </table:table-cell>
          <table:table-cell table:style-name="表格56.A2" office:value-type="string">
            <text:p text:style-name="P37">節點的大小關係</text:p>
          </table:table-cell>
          <table:table-cell table:style-name="表格56.A2" office:value-type="string">
            <text:p text:style-name="P84">左子樹 &lt; 根 &lt; 右子樹</text:p>
          </table:table-cell>
          <table:table-cell table:style-name="表格56.A2" office:value-type="string">
            <text:p text:style-name="P37">快速搜尋任意值</text:p>
          </table:table-cell>
        </table:table-row>
        <table:table-row table:style-name="表格56.1">
          <table:table-cell table:style-name="表格56.A3" office:value-type="string">
            <text:p text:style-name="P44">完全二元樹</text:p>
          </table:table-cell>
          <table:table-cell table:style-name="表格56.A3" office:value-type="string">
            <text:p text:style-name="P37">樹的形狀</text:p>
          </table:table-cell>
          <table:table-cell table:style-name="表格56.A3" office:value-type="string">
            <text:p text:style-name="P80">最後一層之外填滿；最後一層從左到右依序填入</text:p>
          </table:table-cell>
          <table:table-cell table:style-name="表格56.A3" office:value-type="string">
            <text:p text:style-name="P37">可用陣列高效儲存</text:p>
          </table:table-cell>
        </table:table-row>
      </table:table>
      <text:p text:style-name="P67"/>
      <text:p text:style-name="P46"><text:soft-page-break/>兩者是獨立條件，可以任意組合，共有四種可能：</text:p>
      <text:p text:style-name="P67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able:table-row table:style-name="表格57.1">
          <table:table-cell table:style-name="表格57.A1" office:value-type="string">
            <text:p text:style-name="P96">① BST，非完全二元樹</text:p>
            <text:p text:style-name="P87"><text:s text:c="2"/>50</text:p>
            <text:p text:style-name="P87"><text:s/>/ <text:s/>\</text:p>
            <text:p text:style-name="P87">30 <text:s text:c="2"/>80</text:p>
            <text:p text:style-name="P87"><text:s text:c="2"/>\</text:p>
            <text:p text:style-name="P87"><text:s text:c="2"/>40</text:p>
            <text:p text:style-name="P112">✓ BST（30&lt;40&lt;50&lt;80）</text:p>
            <text:p text:style-name="P104">✗ Complete（左空卻先填右）</text:p>
          </table:table-cell>
          <table:table-cell table:style-name="表格57.B1" office:value-type="string">
            <text:p text:style-name="P70"/>
          </table:table-cell>
          <table:table-cell table:style-name="表格57.A1" office:value-type="string">
            <text:p text:style-name="P96">② 完全二元樹，非BST</text:p>
            <text:p text:style-name="P87"><text:s text:c="4"/>100</text:p>
            <text:p text:style-name="P87"><text:s text:c="3"/>/ <text:s text:c="2"/>\</text:p>
            <text:p text:style-name="P87"><text:s text:c="2"/>80 <text:s text:c="3"/>70</text:p>
            <text:p text:style-name="P72"/>
            <text:p text:style-name="P112">✓ Complete（左右填滿）</text:p>
            <text:p text:style-name="P104">✗ BST（70不滿足右&gt;根）</text:p>
          </table:table-cell>
          <table:table-cell table:style-name="表格57.B1" office:value-type="string">
            <text:p text:style-name="P70"/>
          </table:table-cell>
          <table:table-cell table:style-name="表格57.E1" office:value-type="string">
            <text:p text:style-name="P114">③ 同時是兩者</text:p>
            <text:p text:style-name="P87"><text:s text:c="3"/>50</text:p>
            <text:p text:style-name="P87"><text:s text:c="2"/>/ <text:s/>\</text:p>
            <text:p text:style-name="P87"><text:s/>30 <text:s text:c="2"/>80</text:p>
            <text:p text:style-name="P87"><text:s/>/\ <text:s text:c="2"/>/</text:p>
            <text:p text:style-name="P87">20 40 70</text:p>
            <text:p text:style-name="P112">✓ BST <text:s/>✓ Complete</text:p>
          </table:table-cell>
          <table:table-cell table:style-name="表格57.B1" office:value-type="string">
            <text:p text:style-name="P70"/>
          </table:table-cell>
          <table:table-cell table:style-name="表格57.G1" office:value-type="string">
            <text:p text:style-name="P22">④ 都不是</text:p>
            <text:p text:style-name="P87">50</text:p>
            <text:p text:style-name="P87"><text:s text:c="2"/>\</text:p>
            <text:p text:style-name="P87"><text:s/>80</text:p>
            <text:p text:style-name="P72"/>
            <text:p text:style-name="P104">✗ BST（80在左違規）</text:p>
            <text:p text:style-name="P104">✗ Complete（形狀不完整）</text:p>
          </table:table-cell>
        </table:table-row>
      </table:table>
      <text:p text:style-name="P71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9">📌 一句話記憶</text:p>
            <text:p text:style-name="P70"><text:span text:style-name="T12">BST 管大小（左 &lt; 根 &lt; 右）</text:span><text:span text:style-name="T1">　　</text:span><text:span text:style-name="T12">Complete Binary Tree 管形狀（從左到右填滿）</text:span></text:p>
            <text:p text:style-name="P74">Heap = 完全二元樹 ＋ 父子大小規則（父 ≥ 子 或 父 ≤ 子）</text:p>
            <text:p text:style-name="P74">AVL = BST ＋ 平衡規則（|BF| ≤ 1）</text:p>
            <text:p text:style-name="P74">RBT = BST ＋ 顏色規則（五條）</text:p>
          </table:table-cell>
        </table:table-row>
      </table:table>
      <text:p text:style-name="P67"/>
      <text:h text:style-name="P10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32">結構</text:p>
          </table:table-cell>
          <table:table-cell table:style-name="表格59.A1" office:value-type="string">
            <text:p text:style-name="P32">O(log n) 的來源</text:p>
          </table:table-cell>
          <table:table-cell table:style-name="表格59.A1" office:value-type="string">
            <text:p text:style-name="P32">類比</text:p>
          </table:table-cell>
        </table:table-row>
        <table:table-row table:style-name="表格59.1">
          <table:table-cell table:style-name="表格59.A2" office:value-type="string">
            <text:p text:style-name="P37">BST（平衡時）</text:p>
          </table:table-cell>
          <table:table-cell table:style-name="表格59.A2" office:value-type="string">
            <text:p text:style-name="P37">每次搜尋<text:span text:style-name="T46">排除半棵樹</text:span>（利用<text:span text:style-name="T18">左 &lt; 根 &lt; 右</text:span>）</text:p>
          </table:table-cell>
          <table:table-cell table:style-name="表格59.A2" office:value-type="string">
            <text:p text:style-name="P37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37">AVL Tree</text:p>
          </table:table-cell>
          <table:table-cell table:style-name="表格59.A3" office:value-type="string">
            <text:p text:style-name="P37">同 BST，加上<text:span text:style-name="T17">強制平衡</text:span>確保不退化</text:p>
          </table:table-cell>
          <table:table-cell table:style-name="表格59.A3" office:value-type="string">
            <text:p text:style-name="P37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37">Red-Black Tree</text:p>
          </table:table-cell>
          <table:table-cell table:style-name="表格59.A2" office:value-type="string">
            <text:p text:style-name="P37">同 BST，加上<text:span text:style-name="T17">顏色規則</text:span>確保不退化</text:p>
          </table:table-cell>
          <table:table-cell table:style-name="表格59.A2" office:value-type="string">
            <text:p text:style-name="P37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37">Heap（插入/刪除）</text:p>
          </table:table-cell>
          <table:table-cell table:style-name="表格59.A3" office:value-type="string">
            <text:p text:style-name="P37"><text:span text:style-name="T34">完全二元樹的高度 = log n</text:span>，Up/Down-Heap 最多走樹高步</text:p>
          </table:table-cell>
          <table:table-cell table:style-name="表格59.A3" office:value-type="string">
            <text:p text:style-name="P37">像在高樓梯<text:span text:style-name="T17">爬樓梯</text:span>，<text:span text:style-name="T60">樓層數 = log n</text:span></text:p>
          </table:table-cell>
        </table:table-row>
      </table:table>
      <text:p text:style-name="P67"/>
      <text:p text:style-name="P73"/>
      <text:h text:style-name="P2" text:outline-level="1">二、BST（Binary Search Tree）</text:h>
      <text:h text:style-name="P11" text:outline-level="2">2.1 基本規則</text:h>
      <text:p text:style-name="P29"><text:span text:style-name="T12">BST 的核心原則：</text:span><text:span text:style-name="T1">對任意節點而言，左子樹中所有節點的值均小於該節點，右子樹中所有節點的值均大於該節點。</text:span></text:p>
      <text:p text:style-name="P30"/>
      <text:p text:style-name="P48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8"><text:s text:c="8"/>50</text:p>
            <text:p text:style-name="P88"><text:s text:c="7"/>/ <text:s/>\</text:p>
            <text:p text:style-name="P88"><text:s text:c="5"/>30 <text:s text:c="3"/>80</text:p>
            <text:p text:style-name="P88"><text:s text:c="4"/>/ \ <text:s text:c="2"/>/ \</text:p>
            <text:p text:style-name="P88"><text:s text:c="2"/>20 40 70 90</text:p>
          </table:table-cell>
        </table:table-row>
      </table:table>
      <text:p text:style-name="P30"/>
      <text:h text:style-name="P11" text:outline-level="2">2.2 插入操作</text:h>
      <text:p text:style-name="P48">插入規則：從根開始比較，小於往左走，大於往右走，直到找到空位後插入。</text:p>
      <text:p text:style-name="P30"/>
      <text:p text:style-name="P29"><text:span text:style-name="T12">範例：</text:span><text:span text:style-name="T1">將 35 插入上方樹</text:span></text:p>
      <text:list xml:id="list1164903764" text:style-name="WWNum2">
        <text:list-item text:start-value="1">
          <text:p text:style-name="P146">35 &lt; 50 → 往左走</text:p>
        </text:list-item>
        <text:list-item>
          <text:p text:style-name="P146">35 &gt; 30 → 往右走</text:p>
        </text:list-item>
        <text:list-item>
          <text:p text:style-name="P146">35 &lt; 40 → 往左走</text:p>
        </text:list-item>
        <text:list-item>
          <text:p text:style-name="P146">到達空位，插入 35</text:p>
        </text:list-item>
      </text:list>
      <text:p text:style-name="P30"/>
      <text:h text:style-name="P102" text:outline-level="2">2.3 刪除操作（考試重點！）</text:h>
      <text:p text:style-name="P75">共分三種情況，必須熟記：</text:p>
      <text:p text:style-name="P12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33">情況</text:p>
          </table:table-cell>
          <table:table-cell table:style-name="表格4.A1" office:value-type="string">
            <text:p text:style-name="P33">條件</text:p>
          </table:table-cell>
          <table:table-cell table:style-name="表格4.A1" office:value-type="string">
            <text:p text:style-name="P33">處理方式</text:p>
          </table:table-cell>
          <table:table-cell table:style-name="表格4.A1" office:value-type="string">
            <text:p text:style-name="P33">範例</text:p>
          </table:table-cell>
        </table:table-row>
        <table:table-row table:style-name="表格4.1">
          <table:table-cell table:style-name="表格4.A2" office:value-type="string">
            <text:p text:style-name="P38">① 葉節點</text:p>
          </table:table-cell>
          <table:table-cell table:style-name="表格4.A2" office:value-type="string">
            <text:p text:style-name="P38">無任何子節點</text:p>
          </table:table-cell>
          <table:table-cell table:style-name="表格4.A2" office:value-type="string">
            <text:p text:style-name="P38">直接刪除</text:p>
          </table:table-cell>
          <table:table-cell table:style-name="表格4.A2" office:value-type="string">
            <text:p text:style-name="P38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38">② 一個子節點</text:p>
          </table:table-cell>
          <table:table-cell table:style-name="表格4.A3" office:value-type="string">
            <text:p text:style-name="P38">只有左子樹或右子樹（另一側為空）</text:p>
          </table:table-cell>
          <table:table-cell table:style-name="表格4.A3" office:value-type="string">
            <text:p text:style-name="P38">子節點直接接替被刪節點的位置</text:p>
          </table:table-cell>
          <table:table-cell table:style-name="表格4.A3" office:value-type="string">
            <text:p text:style-name="P38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38">③ <text:span text:style-name="T76">兩個子節點</text:span></text:p>
          </table:table-cell>
          <table:table-cell table:style-name="表格4.A2" office:value-type="string">
            <text:p text:style-name="P85">左右子樹皆存在</text:p>
          </table:table-cell>
          <table:table-cell table:style-name="表格4.A2" office:value-type="string">
            <text:p text:style-name="P38"><text:span text:style-name="T18">找中序後繼</text:span>（<text:span text:style-name="T60">右子樹最小值</text:span>）替換，再刪去後繼節點</text:p>
          </table:table-cell>
          <table:table-cell table:style-name="表格4.A2" office:value-type="string">
            <text:p text:style-name="P38">刪除 30：<text:span text:style-name="T17">中序後繼是 40</text:span>（30 的右子樹最小值），以 40 替換 30</text:p>
          </table:table-cell>
        </table:table-row>
      </table:table>
      <text:p text:style-name="P123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60">❓ 為什麼刪除 30 要找「右子樹最小值 40」來替換？完整推導過程</text:p>
            <text:p text:style-name="P76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89"><text:s text:c="8"/>50</text:p>
                  <text:p text:style-name="P89"><text:s text:c="7"/>/ <text:s/>\</text:p>
                  <text:p text:style-name="P89"><text:s text:c="5"/>30 <text:s text:c="3"/>80</text:p>
                  <text:p text:style-name="P89"><text:s text:c="4"/>/ \ <text:s text:c="2"/>/ \</text:p>
                  <text:p text:style-name="P124"><text:soft-page-break/><text:span text:style-name="T67"><text:s text:c="3"/>20 </text:span><text:span text:style-name="T54">40</text:span><text:span text:style-name="T67"> 70 90</text:span></text:p>
                </table:table-cell>
              </table:table-row>
            </table:table>
            <text:p text:style-name="P125"/>
            <text:p text:style-name="P76">Step 1：確認 30 有兩個子節點</text:p>
            <text:p text:style-name="P49">30 的左子是 20，右子是 40，兩側都有，屬於「情況③」，不能直接刪除。</text:p>
            <text:p text:style-name="P126"/>
            <text:p text:style-name="P76">Step 2：思考「刪掉 30 之後，這個位置要填什麼值？」</text:p>
            <text:p text:style-name="P49">填進來的新值必須同時滿足兩個條件：</text:p>
            <text:p text:style-name="P49">　　條件 A：必須大於左子樹所有節點（即 &gt; 20）</text:p>
            <text:p text:style-name="P49">　　條件 B：必須小於父節點 50（即 &lt; 50）</text:p>
            <text:p text:style-name="P49">換句話說，這個值必須夾在 20 和 50 之間，也就是「<text:span text:style-name="T41">比 30 大一點點、又不能超過 50 的那個數</text:span>」。</text:p>
            <text:p text:style-name="P126"/>
            <text:p text:style-name="P76">Step 3：在樹裡找出這個值</text:p>
            <text:p text:style-name="P49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27"><text:span text:style-name="T1">20 <text:s/>→ <text:s/></text:span><text:span text:style-name="T69">30（被刪）</text:span><text:span text:style-name="T1"> <text:s/>→ <text:s/></text:span><text:span text:style-name="T81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127"/>
            <text:p text:style-name="P124"><text:span text:style-name="T1">中序走訪中，</text:span><text:span text:style-name="T55">30 的下一個數字是 40</text:span><text:span text:style-name="T1">。</text:span><text:span text:style-name="T8">這個「下一個」</text:span><text:span text:style-name="T1">就叫做「</text:span><text:span text:style-name="T13">中序後繼（Inorder Successor）</text:span><text:span text:style-name="T1">」，它是比 30 大、且在整棵樹中最接近 30 的值，天然滿足上面的條件 A 和條件 B。</text:span></text:p>
            <text:p text:style-name="P126"/>
            <text:p text:style-name="P76">Step 4：怎麼快速找到中序後繼？</text:p>
            <text:p text:style-name="P49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1">中序後繼 = <text:span text:style-name="T66">被刪節點的</text:span><text:span text:style-name="T83">右子樹</text:span><text:span text:style-name="T66">中</text:span>，<text:span text:style-name="T84">最</text:span><text:span text:style-name="T85">左下角（最小）</text:span><text:span text:style-name="T84">的節點</text:span></text:p>
                </table:table-cell>
              </table:table-row>
            </table:table>
            <text:p text:style-name="P127"/>
            <text:p text:style-name="P49">以本例來說：30 的右子樹只有 40 一個節點，所以 40 就是中序後繼。</text:p>
            <text:p text:style-name="P126"/>
            <text:p text:style-name="P76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97">刪除前</text:p>
                  <text:p text:style-name="P89"><text:s text:c="8"/>50</text:p>
                  <text:p text:style-name="P89"><text:s text:c="7"/>/ <text:s/>\</text:p>
                  <text:p text:style-name="P89"><text:s text:c="5"/>30 <text:s text:c="3"/>80 <text:s text:c="2"/>← 要刪 30</text:p>
                  <text:p text:style-name="P89"><text:s text:c="4"/>/ \ <text:s text:c="2"/>/ \</text:p>
                  <text:p text:style-name="P89"><text:s text:c="3"/>20 40 70 90</text:p>
                </table:table-cell>
                <table:table-cell table:style-name="表格64.B1" office:value-type="string">
                  <text:p text:style-name="P65">→</text:p>
                </table:table-cell>
                <table:table-cell table:style-name="表格64.C1" office:value-type="string">
                  <text:p text:style-name="P115">刪除後（40 替換 30）</text:p>
                  <text:p text:style-name="P89"><text:s text:c="8"/>50</text:p>
                  <text:p text:style-name="P89"><text:s text:c="7"/>/ <text:s/>\</text:p>
                  <text:p text:style-name="P89"><text:s text:c="5"/>40 <text:s text:c="3"/>80 <text:s text:c="2"/>← 40 接替 30</text:p>
                  <text:p text:style-name="P89"><text:s text:c="4"/>/ <text:s text:c="4"/>/ \</text:p>
                  <text:p text:style-name="P89"><text:s text:c="3"/>20 <text:s text:c="3"/>70 90 <text:s/>← 原 40 位置空出</text:p>
                </table:table-cell>
              </table:table-row>
            </table:table>
            <text:p text:style-name="P126"/>
            <text:p text:style-name="P124">以 40 替換 30 之後，仍滿足 BST 規則：20 &lt; 40 &lt; 50，整棵樹合法。✓</text:p>
          </table:table-cell>
        </table:table-row>
      </table:table>
      <text:p text:style-name="P123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8">📌 中序後繼（Inorder Successor）</text:p>
            <text:p text:style-name="P29"><text:span text:style-name="T12">定義：</text:span><text:span text:style-name="T26">右子樹中值最小的節點</text:span><text:span text:style-name="T1">（即</text:span><text:span text:style-name="T86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30"/>
      <text:h text:style-name="P11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31">操作</text:p>
          </table:table-cell>
          <table:table-cell table:style-name="表格6.A1" office:value-type="string">
            <text:p text:style-name="P31">平均情況</text:p>
          </table:table-cell>
          <table:table-cell table:style-name="表格6.A1" office:value-type="string">
            <text:p text:style-name="P31">最差情況（退化）</text:p>
          </table:table-cell>
        </table:table-row>
        <table:table-row table:style-name="表格6.1">
          <table:table-cell table:style-name="表格6.A2" office:value-type="string">
            <text:p text:style-name="P36">搜尋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  <table:table-row table:style-name="表格6.1">
          <table:table-cell table:style-name="表格6.A3" office:value-type="string">
            <text:p text:style-name="P36">插入</text:p>
          </table:table-cell>
          <table:table-cell table:style-name="表格6.A3" office:value-type="string">
            <text:p text:style-name="P36">O(log n)</text:p>
          </table:table-cell>
          <table:table-cell table:style-name="表格6.A3" office:value-type="string">
            <text:p text:style-name="P36">O(n)</text:p>
          </table:table-cell>
        </table:table-row>
        <table:table-row table:style-name="表格6.1">
          <table:table-cell table:style-name="表格6.A2" office:value-type="string">
            <text:p text:style-name="P36">刪除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</table:table>
      <text:p text:style-name="P30"/>
      <text:p text:style-name="P29"><text:span text:style-name="T12">為什麼最差是 O(n)？</text:span><text:span text:style-name="T1"> </text:span><text:span text:style-name="T27">若依序插入 1, 2, 3, 4, 5，BST 會退化成如同鏈結串列的右斜樹</text:span><text:span text:style-name="T1">，搜尋必須遍歷所有節點。</text:span><text:span text:style-name="T49">這正是 AVL 與 RBT 誕生的原因</text:span><text:span text:style-name="T1">。</text:span></text:p>
      <text:p text:style-name="P30"/>
      <text:p text:style-name="Standard"/>
      <text:h text:style-name="P2" text:outline-level="1">三、AVL Tree（平衡二元搜尋樹）</text:h>
      <text:p text:style-name="P29"><text:span text:style-name="T12">AVL Tree =</text:span><text:span text:style-name="T43"> BST </text:span><text:span text:style-name="T12">+ 強制平衡。</text:span><text:span text:style-name="T1">在每次插入或刪除後，都會檢查並維持</text:span><text:span text:style-name="T88">每個節點的「平衡因子」</text:span><text:span text:style-name="T1">，</text:span><text:span text:style-name="T62">確保樹的高度始終維持在 </text:span><text:span text:style-name="T55">O(log n)</text:span><text:span text:style-name="T1">。</text:span></text:p>
      <text:p text:style-name="P30"/>
      <text:h text:style-name="P11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8">BF = 左子樹高度 <text:s/>− <text:s/>右子樹高度</text:p>
            <text:p text:style-name="P107">合法範圍：BF ∈ { −1, 0, +1 }，即 |BF| ≤ 1</text:p>
          </table:table-cell>
        </table:table-row>
      </table:table>
      <text:p text:style-name="P129"/>
      <text:p text:style-name="P29"><text:span text:style-name="T12">+1：</text:span><text:span text:style-name="T1">左子樹較高，</text:span><text:span text:style-name="T12">0：</text:span><text:span text:style-name="T1">完全平衡，</text:span><text:span text:style-name="T12">−1：</text:span><text:span text:style-name="T1">右子樹較高。若 |BF| = 2，則發生失衡，必須旋轉修正。</text:span></text:p>
      <text:p text:style-name="P30"/>
      <text:h text:style-name="P102" text:outline-level="2">3.2 四種旋轉（AVL 最核心考點）</text:h>
      <text:p text:style-name="P48">插入或刪除後，若發現失衡節點，依據失衡方向分為四種情況：</text:p>
      <text:p text:style-name="P30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31">失衡類型</text:p>
          </table:table-cell>
          <table:table-cell table:style-name="表格8.A1" office:value-type="string">
            <text:p text:style-name="P31">失衡方向</text:p>
          </table:table-cell>
          <table:table-cell table:style-name="表格8.A1" office:value-type="string">
            <text:p text:style-name="P31">處理方式</text:p>
          </table:table-cell>
          <table:table-cell table:style-name="表格8.A1" office:value-type="string">
            <text:p text:style-name="P31">口訣</text:p>
          </table:table-cell>
        </table:table-row>
        <table:table-row table:style-name="表格8.1">
          <table:table-cell table:style-name="表格8.A2" office:value-type="string">
            <text:p text:style-name="P36">LL（左左）</text:p>
          </table:table-cell>
          <table:table-cell table:style-name="表格8.A2" office:value-type="string">
            <text:p text:style-name="P36"><text:span text:style-name="T17">失衡節點</text:span>的<text:span text:style-name="T77">左</text:span>子樹 → 又<text:span text:style-name="T77">往左插入</text:span></text:p>
          </table:table-cell>
          <table:table-cell table:style-name="表格8.A2" office:value-type="string">
            <text:p text:style-name="P36"><text:span text:style-name="T18">對失衡節點</text:span>做「<text:span text:style-name="T78">右旋</text:span>」</text:p>
          </table:table-cell>
          <table:table-cell table:style-name="表格8.A2" office:value-type="string">
            <text:p text:style-name="P36"><text:span text:style-name="T17">LL</text:span> → <text:span text:style-name="T41">右</text:span>旋</text:p>
          </table:table-cell>
        </table:table-row>
        <table:table-row table:style-name="表格8.1">
          <table:table-cell table:style-name="表格8.A3" office:value-type="string">
            <text:p text:style-name="P36">RR（右右）</text:p>
          </table:table-cell>
          <table:table-cell table:style-name="表格8.A3" office:value-type="string">
            <text:p text:style-name="P36"><text:span text:style-name="T17">失衡節點</text:span>的<text:span text:style-name="T78">右</text:span>子樹 → 又<text:span text:style-name="T78">往右插入</text:span></text:p>
          </table:table-cell>
          <table:table-cell table:style-name="表格8.A3" office:value-type="string">
            <text:p text:style-name="P36"><text:span text:style-name="T18">對失衡節點</text:span>做「<text:span text:style-name="T77">左旋</text:span>」</text:p>
          </table:table-cell>
          <table:table-cell table:style-name="表格8.A3" office:value-type="string">
            <text:p text:style-name="P36"><text:span text:style-name="T17">RR</text:span> → <text:span text:style-name="T41">左</text:span>旋</text:p>
          </table:table-cell>
        </table:table-row>
        <table:table-row table:style-name="表格8.1">
          <table:table-cell table:style-name="表格8.A2" office:value-type="string">
            <text:p text:style-name="P36">LR（左右）</text:p>
          </table:table-cell>
          <table:table-cell table:style-name="表格8.A2" office:value-type="string">
            <text:p text:style-name="P36"><text:span text:style-name="T17">失衡節點</text:span>的<text:span text:style-name="T84">左</text:span>子樹 → 轉而<text:span text:style-name="T78">往右插入</text:span></text:p>
          </table:table-cell>
          <table:table-cell table:style-name="表格8.A2" office:value-type="string">
            <text:p text:style-name="P81">先左旋，再右旋</text:p>
          </table:table-cell>
          <table:table-cell table:style-name="表格8.A2" office:value-type="string">
            <text:p text:style-name="P36"><text:span text:style-name="T17">LR</text:span> → <text:span text:style-name="T41">先左後右</text:span></text:p>
          </table:table-cell>
        </table:table-row>
        <table:table-row table:style-name="表格8.1">
          <table:table-cell table:style-name="表格8.A3" office:value-type="string">
            <text:p text:style-name="P36">RL（右左）</text:p>
          </table:table-cell>
          <table:table-cell table:style-name="表格8.A3" office:value-type="string">
            <text:p text:style-name="P36"><text:span text:style-name="T17">失衡節點</text:span>的<text:span text:style-name="T65">右</text:span>子樹 → 轉而<text:span text:style-name="T77">往左插入</text:span></text:p>
          </table:table-cell>
          <table:table-cell table:style-name="表格8.A3" office:value-type="string">
            <text:p text:style-name="P81">先右旋，再左旋</text:p>
          </table:table-cell>
          <table:table-cell table:style-name="表格8.A3" office:value-type="string">
            <text:p text:style-name="P36"><text:span text:style-name="T17">RL</text:span> → <text:span text:style-name="T41">先右後左</text:span></text:p>
          </table:table-cell>
        </table:table-row>
      </table:table>
      <text:p text:style-name="P30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8">🔑 判斷旋轉類型的步驟</text:p>
            <text:p text:style-name="P29"><text:span text:style-name="T12">Step 1：</text:span><text:span text:style-name="T26">找到失衡節點</text:span><text:span text:style-name="T1">（</text:span><text:span text:style-name="T32">|BF| = 2 的節點</text:span><text:span text:style-name="T1">）</text:span></text:p>
            <text:p text:style-name="P29"><text:span text:style-name="T12">Step 2：</text:span><text:span text:style-name="T5">看失衡節點</text:span><text:span text:style-name="T1">哪邊較高 → L 或 R</text:span></text:p>
            <text:p text:style-name="P29"><text:span text:style-name="T12">Step 3：</text:span><text:span text:style-name="T5">看新增節點</text:span><text:span text:style-name="T1">在較高子樹的哪邊 → L 或 R</text:span></text:p>
            <text:p text:style-name="P29"><text:span text:style-name="T12">Step 4：</text:span><text:span text:style-name="T1">組合成 LL / RR / LR / RL，套入口訣即可</text:span></text:p>
          </table:table-cell>
        </table:table-row>
      </table:table>
      <text:p text:style-name="P57"/>
      <text:p text:style-name="P110">LL 旋轉詳解（右旋）</text:p>
      <text:p text:style-name="P48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98">旋轉前（失衡）</text:p>
            <text:p text:style-name="P88"><text:s text:c="4"/>60 <text:s/>(<text:span text:style-name="T17">BF=+2</text:span> ❌)</text:p>
            <text:p text:style-name="P88"><text:s text:c="3"/>/</text:p>
            <text:p text:style-name="P88"><text:s/>25 <text:s/>(<text:span text:style-name="T17">BF=+1</text:span>)</text:p>
            <text:p text:style-name="P88"><text:s/>/</text:p>
            <text:p text:style-name="P88">15</text:p>
          </table:table-cell>
          <table:table-cell table:style-name="表格10.B1" office:value-type="string">
            <text:p text:style-name="P13">→</text:p>
          </table:table-cell>
          <table:table-cell table:style-name="表格10.C1" office:value-type="string">
            <text:p text:style-name="P116">右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98">旋轉前（失衡）</text:p>
            <text:p text:style-name="P88">15 <text:s/>(<text:span text:style-name="T17">BF=−2</text:span> ❌)</text:p>
            <text:p text:style-name="P88"><text:s text:c="2"/>\</text:p>
            <text:p text:style-name="P88"><text:s/>25 <text:s/>(<text:span text:style-name="T17">BF=−1</text:span>)</text:p>
            <text:p text:style-name="P88"><text:s text:c="3"/>\</text:p>
            <text:p text:style-name="P88"><text:s text:c="4"/>60</text:p>
          </table:table-cell>
          <table:table-cell table:style-name="表格11.B1" office:value-type="string">
            <text:p text:style-name="P13">→</text:p>
          </table:table-cell>
          <table:table-cell table:style-name="表格11.C1" office:value-type="string">
            <text:p text:style-name="P116">左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LR 旋轉詳解（先左旋，再右旋）</text:p>
      <text:p text:style-name="P48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98">原始（失衡）</text:p>
            <text:p text:style-name="P88"><text:s text:c="2"/>60 (<text:span text:style-name="T17">BF=+2 </text:span>❌)</text:p>
            <text:p text:style-name="P88"><text:s text:c="2"/>/</text:p>
            <text:p text:style-name="P88">25 (<text:span text:style-name="T18">BF=−1</text:span>)</text:p>
            <text:p text:style-name="P88"><text:s text:c="2"/>\</text:p>
            <text:p text:style-name="P88"><text:s text:c="2"/>30</text:p>
          </table:table-cell>
          <table:table-cell table:style-name="表格12.B1" office:value-type="string">
            <text:p text:style-name="P15">→</text:p>
          </table:table-cell>
          <table:table-cell table:style-name="表格12.C1" office:value-type="string">
            <text:p text:style-name="P62">Step1: 左旋25</text:p>
            <text:p text:style-name="P88"><text:s text:c="2"/>60</text:p>
            <text:p text:style-name="P88"><text:s text:c="2"/>/</text:p>
            <text:p text:style-name="P92">30</text:p>
            <text:p text:style-name="P92">/</text:p>
            <text:p text:style-name="P92">25</text:p>
          </table:table-cell>
          <table:table-cell table:style-name="表格12.B1" office:value-type="string">
            <text:p text:style-name="P15">→</text:p>
          </table:table-cell>
          <table:table-cell table:style-name="表格12.E1" office:value-type="string">
            <text:p text:style-name="P116">Step2: 右旋60</text:p>
            <text:p text:style-name="P88"><text:s text:c="4"/>30 (BF=0 ✓)</text:p>
            <text:p text:style-name="P88"><text:s text:c="3"/>/ <text:s/>\</text:p>
            <text:p text:style-name="P88"><text:s/>25 <text:s text:c="2"/>60</text:p>
          </table:table-cell>
        </table:table-row>
      </table:table>
      <text:p text:style-name="P130"/>
      <text:p text:style-name="P29"><text:span text:style-name="T14">RL 旋轉</text:span><text:span text:style-name="T12">：</text:span><text:span text:style-name="T61">方法與 LR 完全相反</text:span><text:span text:style-name="T1">。失衡在右邊，新增節點在右子節點的左邊。</text:span><text:span text:style-name="T12"> 先右旋，再左旋。</text:span></text:p>
      <text:p text:style-name="P30"/>
      <text:h text:style-name="P11" text:outline-level="2">3.3 AVL 時間複雜度</text:h>
      <text:p text:style-name="P48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31">操作</text:p>
          </table:table-cell>
          <table:table-cell table:style-name="表格13.A1" office:value-type="string">
            <text:p text:style-name="P31">時間複雜度</text:p>
          </table:table-cell>
          <table:table-cell table:style-name="表格13.A1" office:value-type="string">
            <text:p text:style-name="P31">說明</text:p>
          </table:table-cell>
        </table:table-row>
        <table:table-row table:style-name="表格13.1">
          <table:table-cell table:style-name="表格13.A2" office:value-type="string">
            <text:p text:style-name="P36">搜尋（Search）</text:p>
          </table:table-cell>
          <table:table-cell table:style-name="表格13.A2" office:value-type="string">
            <text:p text:style-name="P36">O(<text:span text:style-name="T79">log n</text:span>)</text:p>
          </table:table-cell>
          <table:table-cell table:style-name="表格13.A2" office:value-type="string">
            <text:p text:style-name="P36">永遠保證，不退化</text:p>
          </table:table-cell>
        </table:table-row>
        <table:table-row table:style-name="表格13.1">
          <table:table-cell table:style-name="表格13.A3" office:value-type="string">
            <text:p text:style-name="P36">插入（Insert）</text:p>
          </table:table-cell>
          <table:table-cell table:style-name="表格13.A3" office:value-type="string">
            <text:p text:style-name="P36">O(<text:span text:style-name="T79">log n</text:span>)</text:p>
          </table:table-cell>
          <table:table-cell table:style-name="表格13.A3" office:value-type="string">
            <text:p text:style-name="P36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36">刪除（Delete）</text:p>
          </table:table-cell>
          <table:table-cell table:style-name="表格13.A2" office:value-type="string">
            <text:p text:style-name="P36">O(<text:span text:style-name="T79">log n</text:span>)</text:p>
          </table:table-cell>
          <table:table-cell table:style-name="表格13.A2" office:value-type="string">
            <text:p text:style-name="P36">刪除後最多做 O(log n) 次旋轉</text:p>
          </table:table-cell>
        </table:table-row>
      </table:table>
      <text:p text:style-name="P30"/>
      <text:p text:style-name="Standard"/>
      <text:h text:style-name="P2" text:outline-level="1">四、AVL Tree 實作範例：113 高考 Q3</text:h>
      <text:p text:style-name="P29"><text:span text:style-name="T1">初始 AVL Tree：</text:span><text:span text:style-name="T67">25(15, 60(30, 80))</text:span></text:p>
      <text:p text:style-name="P30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8"><text:s text:c="8"/>25 <text:s/>(<text:span text:style-name="T79">BF=−1</text:span>)</text:p>
            <text:p text:style-name="P88"><text:s text:c="7"/>/ <text:s/>\</text:p>
            <text:p text:style-name="P88"><text:s text:c="5"/>15 <text:s text:c="3"/>60 <text:s/>(<text:span text:style-name="T79">BF=0</text:span>)</text:p>
            <text:p text:style-name="P88"><text:s text:c="10"/>/ <text:s/>\</text:p>
            <text:p text:style-name="P88"><text:s text:c="8"/>30 <text:s text:c="3"/>80</text:p>
          </table:table-cell>
        </table:table-row>
      </table:table>
      <text:p text:style-name="P30"/>
      <text:h text:style-name="P102" text:outline-level="2">步驟一：插入 90</text:h>
      <text:list text:style-name="WWNum3">
        <text:list-item text:start-value="1">
          <text:p text:style-name="P149">90 &gt; 25 → 往右；90 &gt; 60 → 往右；90 &gt; 80 → 放至 80 的右子</text:p>
        </text:list-item>
        <text:list-item>
          <text:p text:style-name="P149">往上檢查：到達節點 25 時，BF = 1 − 3 = −2，超過限制，失衡！</text:p>
        </text:list-item>
        <text:list-item>
          <text:p text:style-name="P149">失衡節點 25 → 右邊太高 → 新節點 90 在右子樹的右邊 → RR 失衡</text:p>
        </text:list-item>
        <text:list-item>
          <text:p text:style-name="P149">處理：對 25 做「左旋」，60 成為新根</text:p>
        </text:list-item>
      </text:list>
      <text:p text:style-name="P30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98">插入後（失衡）</text:p>
            <text:p text:style-name="P88"><text:s text:c="2"/>25 (<text:span text:style-name="T17">BF=−2</text:span> ❌)</text:p>
            <text:p text:style-name="P88"><text:s text:c="2"/>/ \</text:p>
            <text:p text:style-name="P88">15 <text:s text:c="2"/>60</text:p>
            <text:p text:style-name="P88"><text:s text:c="4"/>/ <text:s/>\</text:p>
            <text:p text:style-name="P88"><text:s text:c="2"/>30 <text:s text:c="2"/>80</text:p>
            <text:p text:style-name="P88"><text:s text:c="9"/>\</text:p>
            <text:p text:style-name="P88"><text:s text:c="9"/>90</text:p>
          </table:table-cell>
          <table:table-cell table:style-name="表格15.B1" office:value-type="string">
            <text:p text:style-name="P17">左旋→</text:p>
          </table:table-cell>
          <table:table-cell table:style-name="表格15.C1" office:value-type="string">
            <text:p text:style-name="P116">RR 左旋後（平衡）</text:p>
            <text:p text:style-name="P88"><text:s text:c="7"/>60 <text:s/>(BF=0 ✓)</text:p>
            <text:p text:style-name="P88"><text:s text:c="6"/>/ <text:s/>\</text:p>
            <text:p text:style-name="P88"><text:s text:c="4"/>25 <text:s text:c="3"/>80</text:p>
            <text:p text:style-name="P88"><text:s text:c="3"/>/ <text:s/>\ <text:s text:c="4"/>\</text:p>
            <text:p text:style-name="P88"><text:s/>15 <text:s/><text:span text:style-name="T17">30 </text:span><text:s text:c="3"/>90</text:p>
          </table:table-cell>
        </table:table-row>
      </table:table>
      <text:p text:style-name="P29"><text:span text:style-name="T1">旋轉後：</text:span><text:span text:style-name="T67">60(25(15,30), 80(−,90))</text:span></text:p>
      <text:p text:style-name="P30"/>
      <text:h text:style-name="P102" text:outline-level="2">步驟二：插入 85</text:h>
      <text:list text:continue-numbering="true" text:style-name="WWNum3">
        <text:list-item>
          <text:p text:style-name="P149">85 &gt; 60 → 右；85 &gt; 80 → 右；85 &lt; 90 → 放至 90 的左子</text:p>
        </text:list-item>
        <text:list-item>
          <text:p text:style-name="P149"><text:span text:style-name="T17">往上檢查</text:span>：<text:span text:style-name="T17">到達節點 80 時</text:span>，<text:span text:style-name="T35">BF = 0 − 2 = −2，失衡！</text:span></text:p>
        </text:list-item>
        <text:list-item>
          <text:p text:style-name="P149">失衡節點 80 → 右邊太高 → 新節點 85 在右子樹 90 的左邊 → RL 失衡</text:p>
        </text:list-item>
        <text:list-item>
          <text:p text:style-name="P149">處理：先對 90 做「右旋」，再對 80 做「左旋」，85 提升為新根</text:p>
        </text:list-item>
      </text:list>
      <text:p text:style-name="P30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98">插入後（失衡）</text:p>
            <text:p text:style-name="P88">80 (BF=−2 ❌)</text:p>
            <text:p text:style-name="P88"><text:s text:c="2"/>\</text:p>
            <text:p text:style-name="P88"><text:s text:c="2"/><text:span text:style-name="T17">90</text:span></text:p>
            <text:p text:style-name="P92"><text:s text:c="2"/>/</text:p>
            <text:p text:style-name="P92">85</text:p>
          </table:table-cell>
          <table:table-cell table:style-name="表格16.B1" office:value-type="string">
            <text:p text:style-name="P19">→</text:p>
          </table:table-cell>
          <table:table-cell table:style-name="表格16.C1" office:value-type="string">
            <text:p text:style-name="P62">Step1: 右旋90</text:p>
            <text:p text:style-name="P88">80</text:p>
            <text:p text:style-name="P88"><text:s text:c="2"/>\</text:p>
            <text:p text:style-name="P88"><text:s/><text:span text:style-name="T66"><text:s/>85</text:span></text:p>
            <text:p text:style-name="P93"><text:s text:c="4"/>\</text:p>
            <text:p text:style-name="P93"><text:s text:c="4"/>90</text:p>
          </table:table-cell>
          <table:table-cell table:style-name="表格16.B1" office:value-type="string">
            <text:p text:style-name="P19">→</text:p>
          </table:table-cell>
          <table:table-cell table:style-name="表格16.E1" office:value-type="string">
            <text:p text:style-name="P116">Step2: 左旋80</text:p>
            <text:p text:style-name="P88"><text:s text:c="4"/>85 (BF=0 ✓)</text:p>
            <text:p text:style-name="P88"><text:s text:c="3"/>/ <text:s/>\</text:p>
            <text:p text:style-name="P88"><text:s/>80 <text:s text:c="2"/>90</text:p>
          </table:table-cell>
        </table:table-row>
      </table:table>
      <text:p text:style-name="P29"><text:span text:style-name="T1">旋轉後完整樹：</text:span><text:span text:style-name="T67">60(25(15,30), 85(80,90))</text:span></text:p>
      <text:p text:style-name="P30"/>
      <text:h text:style-name="P102" text:outline-level="2">步驟三：刪除 15</text:h>
      <text:list xml:id="list162606916008535" text:continue-numbering="true" text:style-name="WWNum3">
        <text:list-item>
          <text:p text:style-name="P149">15 為葉節點（無任何子節點）→ 直接刪除</text:p>
        </text:list-item>
        <text:list-item>
          <text:p text:style-name="P148"><text:soft-page-break/><text:span text:style-name="T14">往上重新計算</text:span><text:span text:style-name="T26">所有節點</text:span><text:span text:style-name="T15">的 </text:span><text:span text:style-name="T50">BF 值</text:span></text:p>
        </text:list-item>
      </text:list>
      <text:p text:style-name="P30"/>
      <text:p text:style-name="P77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8"><text:s text:c="9"/>60 (BF=0)</text:p>
            <text:p text:style-name="P88"><text:s text:c="8"/>/ <text:s text:c="4"/>\</text:p>
            <text:p text:style-name="P88"><text:s text:c="5"/>25(BF=−1) <text:s/>85(BF=0)</text:p>
            <text:p text:style-name="P88"><text:s text:c="8"/>\ <text:s text:c="5"/>/ <text:s text:c="4"/>\</text:p>
            <text:p text:style-name="P88"><text:s text:c="6"/>30(0) 80(0) <text:s/>90(0)</text:p>
          </table:table-cell>
        </table:table-row>
      </table:table>
      <text:p text:style-name="P30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58">✏️ 關於 BF 計算的注意事項</text:p>
            <text:p text:style-name="P48">考場筆記若出現 60(-1) 的標記，代表 BF=−1。<text:span text:style-name="T66">本範例最終計算後 60 的 BF 應為 0</text:span>（左高=2, 右高=2）。考試時務必自行計算，不要死背他人筆記中的數字。</text:p>
          </table:table-cell>
        </table:table-row>
      </table:table>
      <text:p text:style-name="P30"/>
      <text:p text:style-name="Standard"/>
      <text:h text:style-name="P2" text:outline-level="1">五、Red-Black Tree（紅黑樹）</text:h>
      <text:p text:style-name="P48">紅黑樹是 <text:span text:style-name="T41">BST</text:span> 的一種，每個節點除了<text:span text:style-name="T79">儲存資料</text:span>外，還<text:span text:style-name="T59">額外儲存一個顏色資訊（Red 或 Black）</text:span>。，<text:span text:style-name="T18">透過一套顏色規則來確保樹的高度</text:span>維持在 <text:span text:style-name="T34">O(log n)</text:span>，避免 BST 退化的問題。</text:p>
      <text:p text:style-name="P30"/>
      <text:h text:style-name="P102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31">規則</text:p>
          </table:table-cell>
          <table:table-cell table:style-name="表格19.A1" office:value-type="string">
            <text:p text:style-name="P31">說明</text:p>
          </table:table-cell>
          <table:table-cell table:style-name="表格19.A1" office:value-type="string">
            <text:p text:style-name="P31">範例</text:p>
          </table:table-cell>
        </table:table-row>
        <table:table-row table:style-name="表格19.1">
          <table:table-cell table:style-name="表格19.A2" office:value-type="string">
            <text:p text:style-name="P36">規則一</text:p>
          </table:table-cell>
          <table:table-cell table:style-name="表格19.A2" office:value-type="string">
            <text:p text:style-name="P36">每個節點非紅即黑</text:p>
          </table:table-cell>
          <table:table-cell table:style-name="表格19.A2" office:value-type="string">
            <text:p text:style-name="P36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36">規則二</text:p>
          </table:table-cell>
          <table:table-cell table:style-name="表格19.A3" office:value-type="string">
            <text:p text:style-name="P131">根節點（Root）必須是黑色</text:p>
          </table:table-cell>
          <table:table-cell table:style-name="表格19.A3" office:value-type="string">
            <text:p text:style-name="P36">樹的根永遠是 Black</text:p>
          </table:table-cell>
        </table:table-row>
        <table:table-row table:style-name="表格19.1">
          <table:table-cell table:style-name="表格19.A2" office:value-type="string">
            <text:p text:style-name="P36">規則三</text:p>
          </table:table-cell>
          <table:table-cell table:style-name="表格19.A2" office:value-type="string">
            <text:p text:style-name="P86">所有 NIL（空節點）都是黑色</text:p>
          </table:table-cell>
          <table:table-cell table:style-name="表格19.A2" office:value-type="string">
            <text:p text:style-name="P36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36">規則四</text:p>
          </table:table-cell>
          <table:table-cell table:style-name="表格19.A3" office:value-type="string">
            <text:p text:style-name="P36"><text:span text:style-name="T42">紅色節點的子節點必須是黑色</text:span>（<text:span text:style-name="T89">紅不接紅</text:span>）</text:p>
          </table:table-cell>
          <table:table-cell table:style-name="表格19.A3" office:value-type="string">
            <text:p text:style-name="P36">違反：B→R→R 連續兩個紅</text:p>
          </table:table-cell>
        </table:table-row>
        <table:table-row table:style-name="表格19.6">
          <table:table-cell table:style-name="表格19.A2" office:value-type="string">
            <text:p text:style-name="P36">規則五</text:p>
          </table:table-cell>
          <table:table-cell table:style-name="表格19.A2" office:value-type="string">
            <text:p text:style-name="P36"><text:span text:style-name="T74">從任一節點</text:span><text:span text:style-name="T18">到其後代 NIL</text:span> 的<text:span text:style-name="T34">所有路徑</text:span>，<text:span text:style-name="T36">經過的黑色節點數目相同</text:span>（<text:span text:style-name="T79">Black Height 相同</text:span>）</text:p>
          </table:table-cell>
          <table:table-cell table:style-name="表格19.A2" office:value-type="string">
            <text:p text:style-name="P36">保證平衡高度</text:p>
          </table:table-cell>
        </table:table-row>
      </table:table>
      <text:p text:style-name="P30"/>
      <text:h text:style-name="P11" text:outline-level="2">5.2 為什麼這些規則能保證 O(log n)？</text:h>
      <text:p text:style-name="P29"><text:span text:style-name="T12">關鍵推論：</text:span><text:span text:style-name="T1">由於「</text:span><text:span text:style-name="T6">紅不能接紅</text:span><text:span text:style-name="T1">」，</text:span><text:span text:style-name="T5">任何路徑上紅節點不能連續出現</text:span><text:span text:style-name="T1">。因此，</text:span><text:span text:style-name="T26">最長路徑最多是「黑紅黑紅黑紅...」的交替排列</text:span><text:span text:style-name="T1">，其</text:span><text:span text:style-name="T44">長度不超過黑色節點數的兩倍</text:span><text:span text:style-name="T1">。加上「</text:span><text:span text:style-name="T33">黑高度相同</text:span><text:span text:style-name="T1">」規則，可以數學證明：</text:span></text:p>
      <text:p text:style-name="P30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5">樹高 h ≤ 2 × log₂(n+1)，即<text:span text:style-name="T45"> h = O(log n)</text:span><text:span text:style-name="T39">(先記! 後補詳細理解)</text:span></text:p>
          </table:table-cell>
        </table:table-row>
      </table:table>
      <text:p text:style-name="P30"/>
      <text:h text:style-name="P11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1">比較項目</text:p>
          </table:table-cell>
          <table:table-cell table:style-name="表格21.A1" office:value-type="string">
            <text:p text:style-name="P31">AVL Tree</text:p>
          </table:table-cell>
          <table:table-cell table:style-name="表格21.A1" office:value-type="string">
            <text:p text:style-name="P31">Red-Black Tree</text:p>
          </table:table-cell>
        </table:table-row>
        <table:table-row table:style-name="表格21.1">
          <table:table-cell table:style-name="表格21.A2" office:value-type="string">
            <text:p text:style-name="P36">平衡嚴格度</text:p>
          </table:table-cell>
          <table:table-cell table:style-name="表格21.A2" office:value-type="string">
            <text:p text:style-name="P36"><text:span text:style-name="T17">更嚴格</text:span>（<text:span text:style-name="T66">|BF| ≤ 1</text:span>）</text:p>
          </table:table-cell>
          <table:table-cell table:style-name="表格21.A2" office:value-type="string">
            <text:p text:style-name="P36"><text:span text:style-name="T85">較寬鬆</text:span>（僅須滿足5條規則）</text:p>
          </table:table-cell>
        </table:table-row>
        <table:table-row table:style-name="表格21.1">
          <table:table-cell table:style-name="表格21.A3" office:value-type="string">
            <text:p text:style-name="P36">樹的高度</text:p>
          </table:table-cell>
          <table:table-cell table:style-name="表格21.A3" office:value-type="string">
            <text:p text:style-name="P36"><text:span text:style-name="T17">更矮</text:span>（查找路徑更短）</text:p>
          </table:table-cell>
          <table:table-cell table:style-name="表格21.A3" office:value-type="string">
            <text:p text:style-name="P36"><text:span text:style-name="T85">稍高</text:span>（最多 2log n）</text:p>
          </table:table-cell>
        </table:table-row>
        <table:table-row table:style-name="表格21.1">
          <table:table-cell table:style-name="表格21.A2" office:value-type="string">
            <text:p text:style-name="P36">旋轉次數</text:p>
          </table:table-cell>
          <table:table-cell table:style-name="表格21.A2" office:value-type="string">
            <text:p text:style-name="P36">插入/刪除可能需要較多旋轉</text:p>
          </table:table-cell>
          <table:table-cell table:style-name="表格21.A2" office:value-type="string">
            <text:p text:style-name="P36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36">查找效能</text:p>
          </table:table-cell>
          <table:table-cell table:style-name="表格21.A3" office:value-type="string">
            <text:p text:style-name="P36"><text:span text:style-name="T17">稍快</text:span>（<text:span text:style-name="T90">因樹較矮</text:span>）</text:p>
          </table:table-cell>
          <table:table-cell table:style-name="表格21.A3" office:value-type="string">
            <text:p text:style-name="P36"><text:span text:style-name="T85">稍慢</text:span>（<text:span text:style-name="T90">因樹可能稍高</text:span>）</text:p>
          </table:table-cell>
        </table:table-row>
        <table:table-row table:style-name="表格21.1">
          <table:table-cell table:style-name="表格21.A2" office:value-type="string">
            <text:p text:style-name="P36">插入/刪除效能</text:p>
          </table:table-cell>
          <table:table-cell table:style-name="表格21.A2" office:value-type="string">
            <text:p text:style-name="P36">稍慢（旋轉較多）</text:p>
          </table:table-cell>
          <table:table-cell table:style-name="表格21.A2" office:value-type="string">
            <text:p text:style-name="P36">稍快（旋轉較少）</text:p>
          </table:table-cell>
        </table:table-row>
        <table:table-row table:style-name="表格21.1">
          <table:table-cell table:style-name="表格21.A3" office:value-type="string">
            <text:p text:style-name="P36">適用場景</text:p>
          </table:table-cell>
          <table:table-cell table:style-name="表格21.A3" office:value-type="string">
            <text:p text:style-name="P36">查找頻繁的應用</text:p>
          </table:table-cell>
          <table:table-cell table:style-name="表格21.A3" office:value-type="string">
            <text:p text:style-name="P36">插入/刪除頻繁的應用（如 Linux 核心、Java TreeMap）</text:p>
          </table:table-cell>
        </table:table-row>
      </table:table>
      <text:p text:style-name="P30"/>
      <text:p text:style-name="Standard"/>
      <text:h text:style-name="P2" text:outline-level="1">六、(2,4)-Tree 與 Red-Black Tree 的對應關係</text:h>
      <text:p text:style-name="P29"><text:span text:style-name="T12">核心觀念：</text:span><text:span text:style-name="T5">Red-Black Tree </text:span><text:span text:style-name="T1">本質上是 </text:span><text:span text:style-name="T26">(2,4)-Tree（又稱 2-3-4 Tree</text:span><text:span text:style-name="T1">）的</text:span><text:span text:style-name="T48">二元樹表示法</text:span><text:span text:style-name="T1">。理解這個對應關係，有助於真正理解為什麼 RBT 要制定那些看似奇怪的規則。</text:span></text:p>
      <text:p text:style-name="P30"/>
      <text:h text:style-name="P11" text:outline-level="2">6.1 什麼是 (2,4)-Tree？</text:h>
      <text:p text:style-name="P48"><text:span text:style-name="T41">(2,4)-Tree 是一種 B-Tree</text:span>，<text:span text:style-name="T59">每個節點可以儲存 1 到 3 個鍵值</text:span>，並<text:span text:style-name="T46">有 2 到 4 個子節點</text:span><text:span text:style-name="T16">(</text:span><text:span text:style-name="T52">命名規則是看「子節點數量」，</text:span><text:span text:style-name="T53">不是「鍵值數量」</text:span><text:span text:style-name="T16">)</text:span>：</text:p>
      <text:p text:style-name="P30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31">節點類型</text:p>
          </table:table-cell>
          <table:table-cell table:style-name="表格22.A1" office:value-type="string">
            <text:p text:style-name="P31">鍵值數量</text:p>
          </table:table-cell>
          <table:table-cell table:style-name="表格22.A1" office:value-type="string">
            <text:p text:style-name="P31">子節點數量</text:p>
          </table:table-cell>
          <table:table-cell table:style-name="表格22.A1" office:value-type="string">
            <text:p text:style-name="P31">範例</text:p>
          </table:table-cell>
        </table:table-row>
        <table:table-row table:style-name="表格22.1">
          <table:table-cell table:style-name="表格22.A2" office:value-type="string">
            <text:p text:style-name="P45">2-node</text:p>
          </table:table-cell>
          <table:table-cell table:style-name="表格22.A2" office:value-type="string">
            <text:p text:style-name="P36">1 個鍵值</text:p>
          </table:table-cell>
          <table:table-cell table:style-name="表格22.A2" office:value-type="string">
            <text:p text:style-name="P36"><text:span text:style-name="T78">2 個子節點</text:span>（或為葉）</text:p>
          </table:table-cell>
          <table:table-cell table:style-name="表格22.A2" office:value-type="string">
            <text:p text:style-name="P36">[50]</text:p>
          </table:table-cell>
        </table:table-row>
        <table:table-row table:style-name="表格22.1">
          <table:table-cell table:style-name="表格22.A3" office:value-type="string">
            <text:p text:style-name="P45">3-node</text:p>
          </table:table-cell>
          <table:table-cell table:style-name="表格22.A3" office:value-type="string">
            <text:p text:style-name="P36">2 個鍵值</text:p>
          </table:table-cell>
          <table:table-cell table:style-name="表格22.A3" office:value-type="string">
            <text:p text:style-name="P36"><text:span text:style-name="T78">3 個子節點</text:span>（或為葉）</text:p>
          </table:table-cell>
          <table:table-cell table:style-name="表格22.A3" office:value-type="string">
            <text:p text:style-name="P36">[30 | 50]</text:p>
          </table:table-cell>
        </table:table-row>
        <table:table-row table:style-name="表格22.1">
          <table:table-cell table:style-name="表格22.A2" office:value-type="string">
            <text:p text:style-name="P45">4-node</text:p>
          </table:table-cell>
          <table:table-cell table:style-name="表格22.A2" office:value-type="string">
            <text:p text:style-name="P36">3 個鍵值</text:p>
          </table:table-cell>
          <table:table-cell table:style-name="表格22.A2" office:value-type="string">
            <text:p text:style-name="P36"><text:span text:style-name="T78">4 個子節點</text:span>（或為葉）</text:p>
          </table:table-cell>
          <table:table-cell table:style-name="表格22.A2" office:value-type="string">
            <text:p text:style-name="P36">[20 | 30 | 50]</text:p>
          </table:table-cell>
        </table:table-row>
      </table:table>
      <text:p text:style-name="P30">為什麼子節點比鍵值多一個？ 因為 <text:span text:style-name="T18">n 個鍵值會把數線切成 n+1 段</text:span>，每段對應一條往下走的路：</text:p>
      <text:p text:style-name="P30"/>
      <text:p text:style-name="P30"><text:s text:c="13"/><text:span text:style-name="T80">[30 | 50] </text:span>← <text:span text:style-name="T41">2個鍵值</text:span>（<text:span text:style-name="T59">3-node</text:span>）</text:p>
      <text:p text:style-name="P30"><text:s text:c="13"/>/ <text:s text:c="4"/>| <text:s text:c="4"/>\ </text:p>
      <text:p text:style-name="P30"><text:s text:c="7"/>&lt;30 30~50 &gt;50 ← <text:span text:style-name="T59">3條路</text:span>（<text:span text:style-name="T59">3個子節點</text:span>）</text:p>
      <text:p text:style-name="P77"/>
      <text:p text:style-name="P29"><text:span text:style-name="T12">最重要特性：</text:span><text:span text:style-name="T28">所有葉節點都在同一層（完全平衡）</text:span><text:span text:style-name="T1">，這正是 RBT「黑高度相同」規則的來源。</text:span></text:p>
      <text:p text:style-name="P30"/>
      <text:h text:style-name="P103" text:outline-level="2">6.2 (2,4)-Tree → Red-Black Tree 轉換規則（一步一步來）</text:h>
      <text:p text:style-name="P50"><text:span text:style-name="T76">轉換的核心思想</text:span>：<text:span text:style-name="T18">把 (2,4)-Tree 的每個節點「展開」成二元樹的形式</text:span>。<text:span text:style-name="T91">展開的方式決定了節點的顏色</text:span>。以下逐步說明三種節點的轉換方法。</text:p>
      <text:p text:style-name="P132"/>
      <text:p text:style-name="P111">Step 1：2-node 怎麼轉？（最簡單）</text:p>
      <text:p text:style-name="P133"><text:span text:style-name="T1">2-node 只有一個鍵值 [X]，本來就是二元樹的形狀，不需要展開，直接對應一個</text:span><text:span text:style-name="T12">黑色節點</text:span><text:span text:style-name="T1">。</text:span></text:p>
      <text:p text:style-name="P132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">(2,4)-Tree 的 2-node</text:p>
            <text:p text:style-name="P134"/>
            <text:p text:style-name="P90"><text:s text:c="6"/>[50]</text:p>
            <text:p text:style-name="P90"><text:s text:c="6"/>/ <text:s/>\</text:p>
            <text:p text:style-name="P90"><text:s text:c="4"/>子1 <text:s text:c="2"/>子2</text:p>
            <text:p text:style-name="P134"/>
            <text:p text:style-name="P50">1 個鍵值，2 條路</text:p>
          </table:table-cell>
          <table:table-cell table:style-name="表格23.B1" office:value-type="string">
            <text:p text:style-name="P14">→</text:p>
          </table:table-cell>
          <table:table-cell table:style-name="表格23.C1" office:value-type="string">
            <text:p text:style-name="P117">RBT<text:span text:style-name="T92">(Red-Black Tree)</text:span> 對應（黑色節點）</text:p>
            <text:p text:style-name="P134"/>
            <text:p text:style-name="P90"><text:s text:c="6"/><text:span text:style-name="T17">50 (黑)</text:span></text:p>
            <text:p text:style-name="P90"><text:s text:c="6"/>/ <text:s/>\</text:p>
            <text:p text:style-name="P90"><text:s text:c="4"/>子1 <text:s text:c="2"/>子2</text:p>
            <text:p text:style-name="P134"/>
            <text:p text:style-name="P120">規則：<text:span text:style-name="T17">直接塗黑，結構不變</text:span></text:p>
          </table:table-cell>
        </table:table-row>
      </table:table>
      <text:p text:style-name="P135"/>
      <text:p text:style-name="P111">Step 2：3-node 怎麼轉？（有兩種展開方向）</text:p>
      <text:p text:style-name="P133"><text:span text:style-name="T32">3-node 有兩個鍵值 [X | Y]</text:span><text:span text:style-name="T1">，需要</text:span><text:span text:style-name="T43">把它「拆成上下兩層」的二元樹結構</text:span><text:span text:style-name="T1">。</text:span><text:span text:style-name="T51">其中一個鍵值成為黑色節點（上層）</text:span><text:span text:style-name="T1">，</text:span><text:span text:style-name="T51">另一個成為紅色節點</text:span><text:span text:style-name="T1">（</text:span><text:span text:style-name="T61">下層，依附在黑節點旁邊</text:span><text:span text:style-name="T1">）。</text:span></text:p>
      <text:p text:style-name="P78">有兩種合法展開方式（X &lt; Y）：</text:p>
      <text:p text:style-name="P132"><text:soft-page-break/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row table:style-name="表格24.1">
          <table:table-cell table:style-name="表格24.A1" office:value-type="string">
            <text:p text:style-name="P5">(2,4)-Tree 3-node</text:p>
            <text:p text:style-name="P136"/>
            <text:p text:style-name="P90"><text:s text:c="3"/>[X | Y]</text:p>
            <text:p text:style-name="P90"><text:s text:c="2"/>/ <text:s text:c="2"/>| <text:s text:c="2"/>\</text:p>
            <text:p text:style-name="P90"><text:s/>A <text:s text:c="3"/>B <text:s text:c="3"/>C</text:p>
            <text:p text:style-name="P136"/>
            <text:p text:style-name="P23">3 條子路（<text:span text:style-name="T79">A &lt; X &lt; B &lt; Y &lt; C</text:span>）</text:p>
          </table:table-cell>
          <table:table-cell table:style-name="表格24.B1" office:value-type="string">
            <text:p text:style-name="P16">→</text:p>
          </table:table-cell>
          <table:table-cell table:style-name="表格24.C1" office:value-type="string">
            <text:p text:style-name="P117">方式①：<text:span text:style-name="T56">Y 為黑，X 為紅</text:span>（<text:span text:style-name="T30">左傾</text:span>）</text:p>
            <text:p text:style-name="P136"/>
            <text:p text:style-name="P90"><text:s text:c="5"/>Y (黑)</text:p>
            <text:p text:style-name="P90"><text:s text:c="4"/>/ <text:s text:c="2"/>\</text:p>
            <text:p text:style-name="P90"><text:s text:c="2"/>X(紅) <text:s text:c="2"/>C</text:p>
            <text:p text:style-name="P90"><text:s text:c="2"/>/ <text:s/>\</text:p>
            <text:p text:style-name="P90"><text:s/>A <text:s text:c="3"/>B</text:p>
            <text:p text:style-name="P136"/>
            <text:p text:style-name="P53">X 變成 Y 的左子（紅色）</text:p>
          </table:table-cell>
          <table:table-cell table:style-name="表格24.B1" office:value-type="string">
            <text:p text:style-name="P24">或</text:p>
          </table:table-cell>
          <table:table-cell table:style-name="表格24.E1" office:value-type="string">
            <text:p text:style-name="P108">方式②：<text:span text:style-name="T56">X 為黑，Y 為紅</text:span>（<text:span text:style-name="T64">右傾</text:span>）</text:p>
            <text:p text:style-name="P136"/>
            <text:p text:style-name="P90"><text:s text:c="3"/>X (黑)</text:p>
            <text:p text:style-name="P90"><text:s text:c="2"/>/ <text:s text:c="2"/>\</text:p>
            <text:p text:style-name="P90"><text:s/>A <text:s text:c="3"/>Y(紅)</text:p>
            <text:p text:style-name="P90"><text:s text:c="6"/>/ <text:s/>\</text:p>
            <text:p text:style-name="P90"><text:s text:c="6"/>B <text:s text:c="3"/>C</text:p>
            <text:p text:style-name="P136"/>
            <text:p text:style-name="P53">Y 變成 X 的右子（紅色）</text:p>
          </table:table-cell>
        </table:table-row>
      </table:table>
      <text:p text:style-name="P13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63">💡 為什麼紅節點一定在黑節點「旁邊（下面）」？</text:p>
            <text:p text:style-name="P50">因為二元樹每個節點只能放一個值。3-node 有兩個鍵值，轉換時必須有一個「往下降一層」。</text:p>
            <text:p text:style-name="P50"><text:span text:style-name="T18">往下降的那個節點就塗成「紅色」</text:span>，<text:span text:style-name="T17">表示</text:span><text:span text:style-name="T59">它其實和上面的黑節點是「同一個 (2,4)-Tree 節點」</text:span>。</text:p>
            <text:p text:style-name="P78"><text:span text:style-name="T17">紅色 = </text:span>『<text:span text:style-name="T57">我跟我的黑色父節點是同一個 (2,4)-node 的成員</text:span>』</text:p>
          </table:table-cell>
        </table:table-row>
      </table:table>
      <text:p text:style-name="P135"/>
      <text:p text:style-name="P111">Step 3：4-node 怎麼轉？（固定展開方式）</text:p>
      <text:p text:style-name="P133"><text:span text:style-name="T32">4-node 有三個鍵值 [X | Y | Z]</text:span><text:span text:style-name="T1">，</text:span><text:span text:style-name="T43">中間的鍵值 Y 成為黑色節點</text:span><text:span text:style-name="T1">，</text:span><text:span text:style-name="T93">X 和 Z 各自成為紅色節點</text:span><text:span text:style-name="T1">，</text:span><text:span text:style-name="T33">分別掛在 Y 的左右</text:span><text:span text:style-name="T1">。</text:span><text:span text:style-name="T5">這種展開方式是固定的，沒有其他選擇。</text:span></text:p>
      <text:p text:style-name="P132"/>
      <table:table table:name="表格65" table:style-name="表格65">
        <table:table-column table:style-name="表格65.A"/>
        <table:table-column table:style-name="表格65.B"/>
        <table:table-column table:style-name="表格65.C"/>
        <table:table-row table:style-name="表格65.1">
          <table:table-cell table:style-name="表格65.A1" office:value-type="string">
            <text:p text:style-name="P5">(2,4)-Tree 4-node</text:p>
            <text:p text:style-name="P134"/>
            <text:p text:style-name="P90"><text:s text:c="4"/>[X | Y | Z]</text:p>
            <text:p text:style-name="P90"><text:s text:c="3"/>/ <text:s text:c="2"/>| <text:s text:c="2"/>| <text:s text:c="2"/>\</text:p>
            <text:p text:style-name="P90"><text:s text:c="2"/>A <text:s text:c="3"/>B <text:s text:c="2"/>C <text:s text:c="3"/>D</text:p>
            <text:p text:style-name="P134"/>
            <text:p text:style-name="P23">4 條子路（A&lt;X&lt;B&lt;Y&lt;C&lt;Z&lt;D）</text:p>
          </table:table-cell>
          <table:table-cell table:style-name="表格65.B1" office:value-type="string">
            <text:p text:style-name="P14">→</text:p>
          </table:table-cell>
          <table:table-cell table:style-name="表格65.C1" office:value-type="string">
            <text:p text:style-name="P117">RBT 對應（黑居中，左右各一紅）</text:p>
            <text:p text:style-name="P134"/>
            <text:p text:style-name="P90"><text:s text:c="8"/><text:span text:style-name="T17"><text:s/>Y (黑)</text:span></text:p>
            <text:p text:style-name="P90"><text:s text:c="8"/>/ <text:s text:c="6"/>\</text:p>
            <text:p text:style-name="P90"><text:s text:c="5"/><text:span text:style-name="T17">X(紅) <text:s text:c="6"/>Z(紅)</text:span></text:p>
            <text:p text:style-name="P90"><text:s text:c="5"/>/ <text:s/>\ <text:s text:c="6"/>/ <text:s/>\</text:p>
            <text:p text:style-name="P90"><text:s text:c="4"/>A <text:s text:c="3"/>B <text:s text:c="4"/>C <text:s text:c="3"/>D</text:p>
            <text:p text:style-name="P134"/>
            <text:p text:style-name="P120">規則：<text:span text:style-name="T41">中間鍵值塗黑，左右鍵值塗紅</text:span></text:p>
          </table:table-cell>
        </table:table-row>
      </table:table>
      <text:p text:style-name="P135"/>
      <text:p text:style-name="P111">Step 4：<text:span text:style-name="T30">4-node 發生 Split（分裂）</text:span>時，RBT 怎麼對應？</text:p>
      <text:p text:style-name="P133"><text:span text:style-name="T48">當 (2,4)-Tree 插入新值導致 4-node 溢位</text:span><text:span text:style-name="T1">，</text:span><text:span text:style-name="T95">必須「Split（分裂）」</text:span><text:span text:style-name="T1">：</text:span><text:span text:style-name="T26">把中間鍵值往上推給父節點</text:span><text:span text:style-name="T1">，</text:span><text:span text:style-name="T32">左右各分成兩個子節點</text:span><text:span text:style-name="T1">。</text:span><text:span text:style-name="T43">這個動作在 RBT 中對應的是「顏色翻轉（Color Flip）」</text:span><text:span text:style-name="T1">，有時加上旋轉。</text:span></text:p>
      <text:p text:style-name="P132"/>
      <table:table table:name="表格66" table:style-name="表格66">
        <table:table-column table:style-name="表格66.A"/>
        <table:table-column table:style-name="表格66.B"/>
        <table:table-column table:style-name="表格66.C"/>
        <table:table-row table:style-name="表格66.1">
          <table:table-cell table:style-name="表格66.A1" office:value-type="string">
            <text:p text:style-name="P99">(2,4)-Tree：4-node Split</text:p>
            <text:p text:style-name="P134"/>
            <text:p text:style-name="P90">父節點 [P]</text:p>
            <text:p text:style-name="P90"><text:s text:c="5"/>|</text:p>
            <text:p text:style-name="P90"><text:s text:c="2"/>[X|Y|Z] <text:s/>← 4-node，插入後溢位</text:p>
            <text:p text:style-name="P136"/>
            <text:p text:style-name="P28"><text:soft-page-break/><text:span text:style-name="T70">↓ Split：</text:span><text:span text:style-name="T29">Y 往上推</text:span></text:p>
            <text:p text:style-name="P136"/>
            <text:p text:style-name="P90">父節點 [P | Y]</text:p>
            <text:p text:style-name="P90"><text:s text:c="9"/>/ <text:s text:c="5"/>\</text:p>
            <text:p text:style-name="P90"><text:s text:c="7"/>[X] <text:s text:c="5"/>[Z]</text:p>
          </table:table-cell>
          <table:table-cell table:style-name="表格66.B1" office:value-type="string">
            <text:p text:style-name="P20">對應</text:p>
          </table:table-cell>
          <table:table-cell table:style-name="表格66.C1" office:value-type="string">
            <text:p text:style-name="P117">RBT：顏色翻轉（Color Flip）</text:p>
            <text:p text:style-name="P134"/>
            <text:p text:style-name="P90"><text:s text:c="5"/><text:span text:style-name="T17">Y (紅) ← Y </text:span><text:span text:style-name="T79">由黑變紅，往上「推」</text:span></text:p>
            <text:p text:style-name="P90"><text:s text:c="4"/>/ <text:s text:c="3"/>\</text:p>
            <text:p text:style-name="P90"><text:s/><text:span text:style-name="T66">X(黑) <text:s/>Z(黑) ← </text:span><text:span text:style-name="T76">兩子由紅變黑</text:span></text:p>
            <text:p text:style-name="P136"/>
            <text:p text:style-name="P28"><text:soft-page-break/><text:span text:style-name="T70">↓ 若 Y 的父節點也是紅 → 再旋轉</text:span></text:p>
            <text:p text:style-name="P136"/>
            <text:p text:style-name="P113">規則：子節點兩個都是紅 → 把兩子變黑，父節點變紅<text:span text:style-name="T96">(</text:span><text:span text:style-name="T58">先略過, 後補</text:span><text:span text:style-name="T96">)</text:span></text:p>
          </table:table-cell>
        </table:table-row>
      </table:table>
      <text:p text:style-name="P135"/>
      <text:p text:style-name="P111">Step 5：完整轉換範例——<text:span text:style-name="T30">一棵 (2,4)-Tree 轉成 RBT</text:span></text:p>
      <text:p text:style-name="P50">以下用一棵具體的 (2,4)-Tree 示範完整轉換過程，讓你看清楚每個節點是怎麼被「展開」的。</text:p>
      <text:p text:style-name="P132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">原始 (2,4)-Tree</text:p>
            <text:p text:style-name="P134"/>
            <text:p text:style-name="P90"><text:s text:c="10"/>[30 | 70] <text:s text:c="14"/>← 3-node（有 30, 70 兩個鍵值）</text:p>
            <text:p text:style-name="P90"><text:s text:c="9"/>/ <text:s text:c="3"/>| <text:s text:c="3"/>\</text:p>
            <text:p text:style-name="P90"><text:s text:c="6"/>[10] <text:s/>[50] <text:s/>[80|90] <text:s text:c="8"/>← 2-node, 2-node, 3-node</text:p>
          </table:table-cell>
        </table:table-row>
      </table:table>
      <text:p text:style-name="P132"/>
      <text:p text:style-name="P78">轉換步驟：</text:p>
      <text:list xml:id="list162606917089874" text:continue-list="list1164903764" text:style-name="WWNum2">
        <text:list-item>
          <text:p text:style-name="P147"><text:span text:style-name="T46">根節點 [30 | 70] 是 3-node</text:span><text:span text:style-name="T31"> </text:span>→ 選擇「<text:span text:style-name="T52">70 為黑，30 為紅</text:span>（<text:span text:style-name="T18">左傾</text:span>）」展開：</text:p>
        </text:list-item>
      </text:list>
      <text:p text:style-name="P13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0"><text:s text:c="9"/><text:span text:style-name="T76">70 (黑) <text:s text:c="8"/>← 70 成為根，塗黑</text:span></text:p>
            <text:p text:style-name="P90"><text:s text:c="8"/>/ <text:s text:c="3"/>\</text:p>
            <text:p text:style-name="P90"><text:s text:c="5"/><text:span text:style-name="T17">30(紅)</text:span> <text:s/>[80|90]的子 <text:s text:c="2"/><text:span text:style-name="T79">← 30 降為左子，塗紅</text:span></text:p>
            <text:p text:style-name="P90"><text:s text:c="5"/>/ <text:s text:c="2"/>\</text:p>
            <text:p text:style-name="P90"><text:s text:c="2"/><text:span text:style-name="T97">[10]的子 <text:s/>[50]的子</text:span></text:p>
          </table:table-cell>
        </table:table-row>
      </table:table>
      <text:p text:style-name="P138"/>
      <text:p text:style-name="P51">接著把三個子節點依規則展開，填入上面的佔位符位置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6">展開過程：三個子節點替換佔位符後的樣子</text:p>
            <text:p text:style-name="P140"/>
            <text:p text:style-name="P91"><text:s text:c="14"/>70 (黑)</text:p>
            <text:p text:style-name="P91"><text:s text:c="13"/>/ <text:s text:c="6"/>\</text:p>
            <text:p text:style-name="P91"><text:s text:c="10"/>30 (紅) <text:s text:c="2"/><text:span text:style-name="T83"><text:s/>90 (黑)</text:span> <text:s text:c="2"/>← <text:span text:style-name="T79">[80|90] 是 3-node</text:span>：90 黑為根，80 紅為左子</text:p>
            <text:p text:style-name="P91"><text:s text:c="10"/>/ <text:s text:c="2"/>\ <text:s text:c="5"/>/</text:p>
            <text:p text:style-name="P91"><text:s text:c="7"/><text:span text:style-name="T97">10(黑) 50(黑)</text:span> <text:span text:style-name="T83">80(紅)</text:span> <text:s text:c="3"/>← <text:span text:style-name="T79">[10][50] 是 2-node</text:span>：直接塗黑即可</text:p>
            <text:p text:style-name="P140"/>
            <text:p text:style-name="P25">所有佔位符替換完畢，就是最終的 RBT</text:p>
          </table:table-cell>
        </table:table-row>
      </table:table>
      <text:p text:style-name="P141"/>
      <text:p text:style-name="P79">最終 RBT（與上圖完全相同，確認無誤）：</text:p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118">轉換後的 Red-Black Tree</text:p>
            <text:p text:style-name="P140"/>
            <text:p text:style-name="P91"><text:s text:c="14"/>70 (黑) <text:s text:c="14"/>← 根，黑色</text:p>
            <text:p text:style-name="P91"><text:s text:c="13"/>/ <text:s text:c="6"/>\</text:p>
            <text:p text:style-name="P91"><text:s text:c="10"/>30 (紅) <text:s text:c="3"/>90 (黑) <text:s text:c="8"/>← 30 紅，90 黑</text:p>
            <text:p text:style-name="P91"><text:s text:c="10"/>/ <text:s text:c="2"/>\ <text:s text:c="5"/>/</text:p>
            <text:p text:style-name="P142"><text:soft-page-break/><text:span text:style-name="T67"><text:s text:c="7"/>10(黑) 50(黑) 80(紅) <text:s text:c="9"/>← 10,50 黑；80 紅</text:span></text:p>
            <text:p text:style-name="P140"/>
            <text:p text:style-name="P121">驗證：根黑 ✓　<text:span text:style-name="T18">紅不接紅</text:span> ✓　<text:span text:style-name="T87">各路徑黑高度相同（= 2）</text:span>✓</text:p>
          </table:table-cell>
        </table:table-row>
      </table:table>
      <text:p text:style-name="P143"/>
      <text:h text:style-name="P12" text:outline-level="2">6.3 轉換規則快速對照表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column table:style-name="表格70.D"/>
        <table:table-row table:style-name="表格70.1">
          <table:table-cell table:style-name="表格70.A1" office:value-type="string">
            <text:p text:style-name="P34">(2,4)-Tree 節點</text:p>
          </table:table-cell>
          <table:table-cell table:style-name="表格70.A1" office:value-type="string">
            <text:p text:style-name="P34">轉換後 RBT 結構</text:p>
          </table:table-cell>
          <table:table-cell table:style-name="表格70.A1" office:value-type="string">
            <text:p text:style-name="P34">顏色規則</text:p>
          </table:table-cell>
          <table:table-cell table:style-name="表格70.A1" office:value-type="string">
            <text:p text:style-name="P34">備註</text:p>
          </table:table-cell>
        </table:table-row>
        <table:table-row table:style-name="表格70.1">
          <table:table-cell table:style-name="表格70.A2" office:value-type="string">
            <text:p text:style-name="P41">2-node [X]</text:p>
          </table:table-cell>
          <table:table-cell table:style-name="表格70.A2" office:value-type="string">
            <text:p text:style-name="P43">X（黑）</text:p>
          </table:table-cell>
          <table:table-cell table:style-name="表格70.A2" office:value-type="string">
            <text:p text:style-name="P41">單一黑色</text:p>
          </table:table-cell>
          <table:table-cell table:style-name="表格70.A2" office:value-type="string">
            <text:p text:style-name="P39">最簡單，直接對應</text:p>
          </table:table-cell>
        </table:table-row>
        <table:table-row table:style-name="表格70.1">
          <table:table-cell table:style-name="表格70.A3" office:value-type="string">
            <text:p text:style-name="P41">3-node [X | Y]</text:p>
          </table:table-cell>
          <table:table-cell table:style-name="表格70.A3" office:value-type="string">
            <text:p text:style-name="P39"><text:span text:style-name="T18">Y（黑）左子 X（紅）</text:span> 或 X<text:span text:style-name="T18">（黑）右子 Y（紅）</text:span></text:p>
          </table:table-cell>
          <table:table-cell table:style-name="表格70.A3" office:value-type="string">
            <text:p text:style-name="P41">一黑一紅</text:p>
          </table:table-cell>
          <table:table-cell table:style-name="表格70.A3" office:value-type="string">
            <text:p text:style-name="P39">有兩種展開方式，兩者皆合法</text:p>
          </table:table-cell>
        </table:table-row>
        <table:table-row table:style-name="表格70.1">
          <table:table-cell table:style-name="表格70.A2" office:value-type="string">
            <text:p text:style-name="P41">4-node [X | Y | Z]</text:p>
          </table:table-cell>
          <table:table-cell table:style-name="表格70.A2" office:value-type="string">
            <text:p text:style-name="P83">Y（黑），左子 X（紅），右子 Z（紅）</text:p>
          </table:table-cell>
          <table:table-cell table:style-name="表格70.A2" office:value-type="string">
            <text:p text:style-name="P55">黑居中，左右各一紅</text:p>
          </table:table-cell>
          <table:table-cell table:style-name="表格70.A2" office:value-type="string">
            <text:p text:style-name="P39">固定展開，中間鍵值為黑</text:p>
          </table:table-cell>
        </table:table-row>
        <table:table-row table:style-name="表格70.1">
          <table:table-cell table:style-name="表格70.A3" office:value-type="string">
            <text:p text:style-name="P39">4-node Split（分裂）</text:p>
          </table:table-cell>
          <table:table-cell table:style-name="表格70.A3" office:value-type="string">
            <text:p text:style-name="P39">顏色翻轉：兩子由紅→黑，父由黑→紅</text:p>
          </table:table-cell>
          <table:table-cell table:style-name="表格70.A3" office:value-type="string">
            <text:p text:style-name="P39">Color Flip</text:p>
          </table:table-cell>
          <table:table-cell table:style-name="表格70.A3" office:value-type="string">
            <text:p text:style-name="P39">若父也是紅則需再旋轉</text:p>
          </table:table-cell>
        </table:table-row>
        <table:table-row table:style-name="表格70.1">
          <table:table-cell table:style-name="表格70.A2" office:value-type="string">
            <text:p text:style-name="P39">所有葉節點同層</text:p>
          </table:table-cell>
          <table:table-cell table:style-name="表格70.A2" office:value-type="string">
            <text:p text:style-name="P39">所有路徑黑高度（Black Height）相同</text:p>
          </table:table-cell>
          <table:table-cell table:style-name="表格70.A2" office:value-type="string">
            <text:p text:style-name="P39">RBT 規則五的來源</text:p>
          </table:table-cell>
          <table:table-cell table:style-name="表格70.A2" office:value-type="string">
            <text:p text:style-name="P39">這正是 RBT 不退化的根本原因</text:p>
          </table:table-cell>
        </table:table-row>
      </table:table>
      <text:p text:style-name="P132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3">📝 考試速記：為什麼 RBT 的規則是這樣定的？</text:p>
            <text:p text:style-name="P133"><text:span text:style-name="T12">「紅不能接紅」</text:span><text:span text:style-name="T1"> → 因為連續兩個紅代表「三個鍵值疊在一起」，已超過 4-node 的上限（最多 3 個鍵值），這在 (2,4)-Tree 是不允許的。</text:span></text:p>
            <text:p text:style-name="P133"><text:span text:style-name="T12">「黑高度相同」</text:span><text:span text:style-name="T1"> → 因為 (2,4)-Tree 要求所有葉節點在同一層。轉換成 RBT 後，只有黑色節點才代表真正的「(2,4)-Tree 層數」，所以每條路徑的黑色節點數必須相同。</text:span></text:p>
            <text:p text:style-name="P133"><text:span text:style-name="T12">「根節點是黑色」</text:span><text:span text:style-name="T1"> → 根節點是整棵樹的起點，沒有父節點，不可能是某個 (2,4)-node 的「依附紅色節點」，所以必須是黑色。</text:span></text:p>
            <text:p text:style-name="P133"><text:span text:style-name="T12">一句話總結：</text:span><text:span text:style-name="T69">RBT 的每一條規則都是在『模擬 (2,4)-Tree 的行為』，不是憑空發明的限制。</text:span></text:p>
          </table:table-cell>
        </table:table-row>
      </table:table>
      <text:p text:style-name="P132"/>
      <text:h text:style-name="P12" text:outline-level="2">6.4 (2,4)-Tree 高度公式</text:h>
      <text:p text:style-name="P50">若 (2,4)-Tree 有 n 個鍵值，其高度 h 滿足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">⌊log₂(n+1)⌋ / 2 <text:s/>≤ <text:s/>h <text:s/>≤ <text:s/>log₂(n+1) <text:s/>→ <text:s/>hRBT ≤ 2h = O(log n)<text:span text:style-name="T82">(</text:span><text:span text:style-name="T58">先略過, 後補</text:span><text:span text:style-name="T82">)</text:span></text:p>
          </table:table-cell>
        </table:table-row>
      </table:table>
      <text:p text:style-name="P132"/>
      <text:p text:style-name="P139"/>
      <text:h text:style-name="P2" text:outline-level="1">七、RBT 實作範例：115 關務 Q4（依序插入 1~8）</text:h>
      <text:p text:style-name="P48">本題展示 BST 與 RBT 插入相同資料後的巨大差異，是理解紅黑樹必要性的最佳範例。</text:p>
      <text:p text:style-name="P30"/>
      <text:h text:style-name="P102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8">BST 退化成右斜樹（鏈結串列）❌</text:p>
            <text:p text:style-name="P88">1</text:p>
            <text:p text:style-name="P88"><text:s/>\</text:p>
            <text:p text:style-name="P88"><text:s text:c="2"/>2</text:p>
            <text:p text:style-name="P88"><text:s text:c="3"/>\</text:p>
            <text:p text:style-name="P88"><text:s text:c="4"/>3</text:p>
            <text:p text:style-name="P88"><text:s text:c="5"/>\</text:p>
            <text:p text:style-name="P88"><text:s text:c="6"/>4</text:p>
            <text:p text:style-name="P88"><text:s text:c="7"/>\</text:p>
            <text:p text:style-name="P88"><text:s text:c="8"/>5 → ... → 8</text:p>
            <text:p text:style-name="P144"/>
            <text:p text:style-name="P98">高度 = 8 = O(n)，搜尋最差需走 8 步</text:p>
          </table:table-cell>
        </table:table-row>
      </table:table>
      <text:p text:style-name="P57"/>
      <text:h text:style-name="P122" text:outline-level="2">RBT 依序插入 1, 2, 3, 4, 5, 6, 7, 8 的過程</text:h>
      <text:p text:style-name="P48">RBT 在每次插入後，透過「變色」與「旋轉」維持平衡。以下是關鍵步驟：</text:p>
      <text:p text:style-name="P30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1">插入節點</text:p>
          </table:table-cell>
          <table:table-cell table:style-name="表格27.A1" office:value-type="string">
            <text:p text:style-name="P31">觸發操作</text:p>
          </table:table-cell>
          <table:table-cell table:style-name="表格27.A1" office:value-type="string">
            <text:p text:style-name="P31">說明</text:p>
          </table:table-cell>
        </table:table-row>
        <table:table-row table:style-name="表格27.1">
          <table:table-cell table:style-name="表格27.A2" office:value-type="string">
            <text:p text:style-name="P36">插入 1</text:p>
          </table:table-cell>
          <table:table-cell table:style-name="表格27.A2" office:value-type="string">
            <text:p text:style-name="P36">無</text:p>
          </table:table-cell>
          <table:table-cell table:style-name="表格27.A2" office:value-type="string">
            <text:p text:style-name="P36">1 為根，塗黑</text:p>
          </table:table-cell>
        </table:table-row>
        <table:table-row table:style-name="表格27.1">
          <table:table-cell table:style-name="表格27.A3" office:value-type="string">
            <text:p text:style-name="P36">插入 2</text:p>
          </table:table-cell>
          <table:table-cell table:style-name="表格27.A3" office:value-type="string">
            <text:p text:style-name="P36">無</text:p>
          </table:table-cell>
          <table:table-cell table:style-name="表格27.A3" office:value-type="string">
            <text:p text:style-name="P36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36">插入 3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36">插入 4</text:p>
          </table:table-cell>
          <table:table-cell table:style-name="表格27.A3" office:value-type="string">
            <text:p text:style-name="P36">變色</text:p>
          </table:table-cell>
          <table:table-cell table:style-name="表格27.A3" office:value-type="string">
            <text:p text:style-name="P36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36">插入 5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36">插入 6~8</text:p>
          </table:table-cell>
          <table:table-cell table:style-name="表格27.A3" office:value-type="string">
            <text:p text:style-name="P36">多次旋轉 + 變色</text:p>
          </table:table-cell>
          <table:table-cell table:style-name="表格27.A3" office:value-type="string">
            <text:p text:style-name="P36">依此類推，RBT 持續自我修正</text:p>
          </table:table-cell>
        </table:table-row>
      </table:table>
      <text:p text:style-name="P30"/>
      <text:p text:style-name="P77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6">RBT 平衡樹（高度 ≈ 4）✓</text:p>
            <text:p text:style-name="P88"><text:s text:c="14"/>4(黑)</text:p>
            <text:p text:style-name="P88"><text:s text:c="11"/>/ <text:s text:c="7"/>\</text:p>
            <text:p text:style-name="P88"><text:s text:c="8"/>2(紅) <text:s text:c="7"/>6(紅)</text:p>
            <text:p text:style-name="P88"><text:s text:c="7"/>/ <text:s text:c="3"/>\ <text:s text:c="6"/>/ <text:s text:c="3"/>\</text:p>
            <text:p text:style-name="P88"><text:s text:c="5"/>1(黑) <text:s/>3(黑) 5(黑) <text:s/>7(黑)</text:p>
            <text:p text:style-name="P88"><text:s text:c="30"/>\</text:p>
            <text:p text:style-name="P88"><text:s text:c="30"/>8(紅)</text:p>
            <text:p text:style-name="P144"/>
            <text:p text:style-name="P116">高度 ≈ 4 = O(log n)，搜尋最差只需 4~5 步</text:p>
          </table:table-cell>
        </table:table-row>
      </table:table>
      <text:p text:style-name="P30"/>
      <text:p text:style-name="Standard"/>
      <text:h text:style-name="P2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58">⚠️ 重要觀念辨別</text:p>
            <text:p text:style-name="P29"><text:span text:style-name="T1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30"/>
      <text:h text:style-name="P11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31">類型</text:p>
          </table:table-cell>
          <table:table-cell table:style-name="表格30.A1" office:value-type="string">
            <text:p text:style-name="P31">規則</text:p>
          </table:table-cell>
          <table:table-cell table:style-name="表格30.A1" office:value-type="string">
            <text:p text:style-name="P31">根節點</text:p>
          </table:table-cell>
          <table:table-cell table:style-name="表格30.A1" office:value-type="string">
            <text:p text:style-name="P31">應用場景</text:p>
          </table:table-cell>
        </table:table-row>
        <table:table-row table:style-name="表格30.1">
          <table:table-cell table:style-name="表格30.A2" office:value-type="string">
            <text:p text:style-name="P36">Max Heap</text:p>
          </table:table-cell>
          <table:table-cell table:style-name="表格30.A2" office:value-type="string">
            <text:p text:style-name="P36">父節點的值 ≥ 所有子節點的值</text:p>
          </table:table-cell>
          <table:table-cell table:style-name="表格30.A2" office:value-type="string">
            <text:p text:style-name="P36">最大值</text:p>
          </table:table-cell>
          <table:table-cell table:style-name="表格30.A2" office:value-type="string">
            <text:p text:style-name="P36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36">Min Heap</text:p>
          </table:table-cell>
          <table:table-cell table:style-name="表格30.A3" office:value-type="string">
            <text:p text:style-name="P36">父節點的值 ≤ 所有子節點的值</text:p>
          </table:table-cell>
          <table:table-cell table:style-name="表格30.A3" office:value-type="string">
            <text:p text:style-name="P36">最小值</text:p>
          </table:table-cell>
          <table:table-cell table:style-name="表格30.A3" office:value-type="string">
            <text:p text:style-name="P36">快速取出最小值、Priority Queue</text:p>
          </table:table-cell>
        </table:table-row>
      </table:table>
      <text:p text:style-name="P30"/>
      <text:p text:style-name="P29"><text:span text:style-name="T12">Heap 的第二個必要條件：</text:span><text:span text:style-name="T1">Heap 一定是「完全二元樹（Complete Binary Tree）」——最後一層的節點必須從左到右依序填滿，不能有空缺。</text:span></text:p>
      <text:p text:style-name="P30"/>
      <text:h text:style-name="P102" text:outline-level="2">8.2 Heap 的陣列表示法（必背公式）</text:h>
      <text:p text:style-name="P48">由於完全二元樹的特性，Heap 可以直接用陣列儲存，不需要指標。設節點從 index 1 開始：</text:p>
      <text:p text:style-name="P3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4">節點 i 的父節點：⌊i/2⌋ <text:s text:c="7"/>左子節點：2i <text:s text:c="7"/>右子節點：2i+1</text:p>
          </table:table-cell>
        </table:table-row>
      </table:table>
      <text:p text:style-name="P30"/>
      <text:p text:style-name="P29"><text:span text:style-name="T1">範例：</text:span><text:span text:style-name="T67">[90, 80, 70, 40, 30, 20, 10]（index 從 1 開始）</text:span></text:p>
      <text:list text:continue-list="list162606916008535" text:style-name="WWNum3">
        <text:list-item>
          <text:p text:style-name="P149">A[5] = 30；A[5] 的父節點 = A[⌊5/2⌋] = A[2] = 80</text:p>
        </text:list-item>
        <text:list-item>
          <text:p text:style-name="P149">A[3] = 70；A[3] 的左子 = A[6] = 20；右子 = A[7] = 10</text:p>
        </text:list-item>
      </text:list>
      <text:p text:style-name="P30"/>
      <text:h text:style-name="P11" text:outline-level="2">8.3 插入（Up-Heap / Heapify Up）</text:h>
      <text:list text:continue-list="list162606917089874" text:style-name="WWNum2">
        <text:list-item>
          <text:p text:style-name="P146">將新元素放在陣列最後（維持完全二元樹）</text:p>
        </text:list-item>
        <text:list-item>
          <text:p text:style-name="P146">與父節點比較：若違反 Heap 規則，與父節點交換</text:p>
        </text:list-item>
        <text:list-item>
          <text:p text:style-name="P146">持續往上比較，直到符合規則或到達根節點</text:p>
        </text:list-item>
      </text:list>
      <text:p text:style-name="P29"><text:span text:style-name="T12">時間複雜度：</text:span><text:span text:style-name="T1">O(log n)（最多走樹的高度步）</text:span></text:p>
      <text:p text:style-name="P30"/>
      <text:h text:style-name="P11" text:outline-level="2">8.4 刪除最大值（Down-Heap / Heapify Down）</text:h>
      <text:list text:continue-numbering="true" text:style-name="WWNum2">
        <text:list-item>
          <text:p text:style-name="P146">取出根節點（最大值）</text:p>
        </text:list-item>
        <text:list-item>
          <text:p text:style-name="P146">將陣列最後一個元素移至根的位置</text:p>
        </text:list-item>
        <text:list-item>
          <text:p text:style-name="P146">與兩個子節點中較大者比較：若違反規則，與較大子節點交換</text:p>
        </text:list-item>
        <text:list-item>
          <text:p text:style-name="P146">持續往下比較，直到符合規則或到達葉節點</text:p>
        </text:list-item>
      </text:list>
      <text:p text:style-name="P29"><text:span text:style-name="T12">時間複雜度：</text:span><text:span text:style-name="T1">O(log n)</text:span></text:p>
      <text:p text:style-name="P30"/>
      <text:h text:style-name="P11" text:outline-level="2">8.5 Heap Sort</text:h>
      <text:p text:style-name="P29"><text:span text:style-name="T12">核心概念：</text:span><text:span text:style-name="T1">利用 Max Heap，每次取出根節點（最大值），固定在陣列尾端，再對剩餘元素做 Down-Heap，直到全部排序完成。</text:span></text:p>
      <text:p text:style-name="P30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31">步驟</text:p>
          </table:table-cell>
          <table:table-cell table:style-name="表格32.A1" office:value-type="string">
            <text:p text:style-name="P31">操作</text:p>
          </table:table-cell>
          <table:table-cell table:style-name="表格32.A1" office:value-type="string">
            <text:p text:style-name="P31">時間</text:p>
          </table:table-cell>
        </table:table-row>
        <table:table-row table:style-name="表格32.1">
          <table:table-cell table:style-name="表格32.A2" office:value-type="string">
            <text:p text:style-name="P36">建立 Max Heap</text:p>
          </table:table-cell>
          <table:table-cell table:style-name="表格32.A2" office:value-type="string">
            <text:p text:style-name="P36">將 n 個元素建成 Max Heap</text:p>
          </table:table-cell>
          <table:table-cell table:style-name="表格32.A2" office:value-type="string">
            <text:p text:style-name="P36">O(n)</text:p>
          </table:table-cell>
        </table:table-row>
        <table:table-row table:style-name="表格32.1">
          <table:table-cell table:style-name="表格32.A3" office:value-type="string">
            <text:p text:style-name="P36">重複 n 次：取出最大值</text:p>
          </table:table-cell>
          <table:table-cell table:style-name="表格32.A3" office:value-type="string">
            <text:p text:style-name="P36">交換根與末端 → Down-Heap</text:p>
          </table:table-cell>
          <table:table-cell table:style-name="表格32.A3" office:value-type="string">
            <text:p text:style-name="P36">每次 O(log n)</text:p>
          </table:table-cell>
        </table:table-row>
        <table:table-row table:style-name="表格32.1">
          <table:table-cell table:style-name="表格32.A2" office:value-type="string">
            <text:p text:style-name="P36">總時間複雜度</text:p>
          </table:table-cell>
          <table:table-cell table:style-name="表格32.A2" office:value-type="string">
            <text:p text:style-name="P36">O(n) + n × O(log n)</text:p>
          </table:table-cell>
          <table:table-cell table:style-name="表格32.A2" office:value-type="string">
            <text:p text:style-name="P36">O(n log n)</text:p>
          </table:table-cell>
        </table:table-row>
      </table:table>
      <text:p text:style-name="P3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8">❓ 為什麼是 O(n log n) 而不是 O(n²)？</text:p>
            <text:p text:style-name="P48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30"/>
      <text:h text:style-name="P11" text:outline-level="2">8.6 Priority Queue（優先佇列）</text:h>
      <text:p text:style-name="P29"><text:span text:style-name="T12">與普通 Queue 的差異：</text:span><text:span text:style-name="T1">普通 Queue 是「先進先出（FIFO）」；Priority Queue 是「優先權高者先出」，不管到達順序。</text:span></text:p>
      <text:p text:style-name="P30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31">資料結構</text:p>
          </table:table-cell>
          <table:table-cell table:style-name="表格34.A1" office:value-type="string">
            <text:p text:style-name="P31">取出最大值</text:p>
          </table:table-cell>
          <table:table-cell table:style-name="表格34.A1" office:value-type="string">
            <text:p text:style-name="P31">插入</text:p>
          </table:table-cell>
          <table:table-cell table:style-name="表格34.A1" office:value-type="string">
            <text:p text:style-name="P31">刪除最大值</text:p>
          </table:table-cell>
        </table:table-row>
        <table:table-row table:style-name="表格34.1">
          <table:table-cell table:style-name="表格34.A2" office:value-type="string">
            <text:p text:style-name="P36">未排序 Array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已排序 Array</text:p>
          </table:table-cell>
          <table:table-cell table:style-name="表格34.A3" office:value-type="string">
            <text:p text:style-name="P36">O(1)</text:p>
          </table:table-cell>
          <table:table-cell table:style-name="表格34.A3" office:value-type="string">
            <text:p text:style-name="P36">O(n)</text:p>
          </table:table-cell>
          <table:table-cell table:style-name="表格34.A3" office:value-type="string">
            <text:p text:style-name="P36">O(1)</text:p>
          </table:table-cell>
        </table:table-row>
        <table:table-row table:style-name="表格34.1">
          <table:table-cell table:style-name="表格34.A2" office:value-type="string">
            <text:p text:style-name="P36">Linked List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BST（平衡）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</table:table-row>
        <table:table-row table:style-name="表格34.1">
          <table:table-cell table:style-name="表格34.A2" office:value-type="string">
            <text:p text:style-name="P36">Heap（最佳選擇）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log n)</text:p>
          </table:table-cell>
          <table:table-cell table:style-name="表格34.A2" office:value-type="string">
            <text:p text:style-name="P36">O(log n)</text:p>
          </table:table-cell>
        </table:table-row>
      </table:table>
      <text:p text:style-name="P30"/>
      <text:p text:style-name="P29"><text:span text:style-name="T12">結論：</text:span><text:span text:style-name="T1">Heap 是實作 Priority Queue 的最佳資料結構，因為取出最大/最小值的時間是 O(1)，插入與刪除都是 O(log n)。</text:span></text:p>
      <text:p text:style-name="P30"/>
      <text:p text:style-name="Standard"/>
      <text:h text:style-name="P2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31">排序法</text:p>
          </table:table-cell>
          <table:table-cell table:style-name="表格35.A1" office:value-type="string">
            <text:p text:style-name="P31">最佳情況</text:p>
          </table:table-cell>
          <table:table-cell table:style-name="表格35.A1" office:value-type="string">
            <text:p text:style-name="P31">平均情況</text:p>
          </table:table-cell>
          <table:table-cell table:style-name="表格35.A1" office:value-type="string">
            <text:p text:style-name="P31">最差情況</text:p>
          </table:table-cell>
          <table:table-cell table:style-name="表格35.A1" office:value-type="string">
            <text:p text:style-name="P31">空間</text:p>
          </table:table-cell>
          <table:table-cell table:style-name="表格35.A1" office:value-type="string">
            <text:p text:style-name="P31">穩定性</text:p>
          </table:table-cell>
        </table:table-row>
        <table:table-row table:style-name="表格35.1">
          <table:table-cell table:style-name="表格35.A2" office:value-type="string">
            <text:p text:style-name="P36">Bubble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Selection Sort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Insertion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Merge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)</text:p>
          </table:table-cell>
          <table:table-cell table:style-name="表格35.A3" office:value-type="string">
            <text:p text:style-name="P36">✓ 穩定</text:p>
          </table:table-cell>
        </table:table-row>
        <table:table-row table:style-name="表格35.1">
          <table:table-cell table:style-name="表格35.A2" office:value-type="string">
            <text:p text:style-name="P36">Quick Sort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✗ 不穩定</text:p>
          </table:table-cell>
        </table:table-row>
        <table:table-row table:style-name="表格35.1">
          <table:table-cell table:style-name="表格35.A3" office:value-type="string">
            <text:p text:style-name="P36">Heap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Binary Search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（查詢非排序）</text:p>
          </table:table-cell>
        </table:table-row>
      </table:table>
      <text:p text:style-name="P30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8">💡 考試提示</text:p>
            <text:p text:style-name="P29"><text:span text:style-name="T12">Merge Sort：</text:span><text:span text:style-name="T1">唯一在所有情況下都是 O(n log n) 且穩定的排序法，但需要額外 O(n) 空間。</text:span></text:p>
            <text:p text:style-name="P29"><text:span text:style-name="T12">Quick Sort：</text:span><text:span text:style-name="T1">最差 O(n²) 發生在每次都選到最大或最小值作為 pivot（如依序插入的已排序資料）。</text:span></text:p>
            <text:p text:style-name="P29"><text:span text:style-name="T1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30"/>
      <text:p text:style-name="Standard"/>
      <text:h text:style-name="P2" text:outline-level="1">十、考前速記總整理</text:h>
      <text:h text:style-name="P11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35">O(1) &lt; O(log n) &lt; O(n) &lt; O(n log n) &lt; O(n²) &lt; O(2ⁿ) &lt; O(n!)</text:p>
          </table:table-cell>
        </table:table-row>
      </table:table>
      <text:p text:style-name="P30"/>
      <text:h text:style-name="P11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31">結構</text:p>
          </table:table-cell>
          <table:table-cell table:style-name="表格38.A1" office:value-type="string">
            <text:p text:style-name="P31">核心規則</text:p>
          </table:table-cell>
          <table:table-cell table:style-name="表格38.A1" office:value-type="string">
            <text:p text:style-name="P31">高度</text:p>
          </table:table-cell>
          <table:table-cell table:style-name="表格38.A1" office:value-type="string">
            <text:p text:style-name="P31">最差時間</text:p>
          </table:table-cell>
        </table:table-row>
        <table:table-row table:style-name="表格38.1">
          <table:table-cell table:style-name="表格38.A2" office:value-type="string">
            <text:p text:style-name="P36">BST</text:p>
          </table:table-cell>
          <table:table-cell table:style-name="表格38.A2" office:value-type="string">
            <text:p text:style-name="P36">左 &lt; 根 &lt; 右</text:p>
          </table:table-cell>
          <table:table-cell table:style-name="表格38.A2" office:value-type="string">
            <text:p text:style-name="P36">O(n)（可退化）</text:p>
          </table:table-cell>
          <table:table-cell table:style-name="表格38.A2" office:value-type="string">
            <text:p text:style-name="P36">O(n)</text:p>
          </table:table-cell>
        </table:table-row>
        <table:table-row table:style-name="表格38.1">
          <table:table-cell table:style-name="表格38.A3" office:value-type="string">
            <text:p text:style-name="P36">AVL</text:p>
          </table:table-cell>
          <table:table-cell table:style-name="表格38.A3" office:value-type="string">
            <text:p text:style-name="P36">|BF| ≤ 1，BF = 左高 − 右高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</text:p>
          </table:table-cell>
        </table:table-row>
        <table:table-row table:style-name="表格38.1">
          <table:table-cell table:style-name="表格38.A2" office:value-type="string">
            <text:p text:style-name="P36">RBT</text:p>
          </table:table-cell>
          <table:table-cell table:style-name="表格38.A2" office:value-type="string">
            <text:p text:style-name="P36">根黑、紅不接紅、黑高相同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  <table:table-row table:style-name="表格38.1">
          <table:table-cell table:style-name="表格38.A3" office:value-type="string">
            <text:p text:style-name="P36">Heap</text:p>
          </table:table-cell>
          <table:table-cell table:style-name="表格38.A3" office:value-type="string">
            <text:p text:style-name="P36">完全二元樹 + 父 ≥ 子（Max）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（刪）</text:p>
          </table:table-cell>
        </table:table-row>
        <table:table-row table:style-name="表格38.1">
          <table:table-cell table:style-name="表格38.A2" office:value-type="string">
            <text:p text:style-name="P36">(2,4)-Tree</text:p>
          </table:table-cell>
          <table:table-cell table:style-name="表格38.A2" office:value-type="string">
            <text:p text:style-name="P36">節點有 1~3 鍵值，葉節點同層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</table:table>
      <text:p text:style-name="P30"/>
      <text:h text:style-name="P102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31">失衡類型</text:p>
          </table:table-cell>
          <table:table-cell table:style-name="表格39.A1" office:value-type="string">
            <text:p text:style-name="P31">判斷方式</text:p>
          </table:table-cell>
          <table:table-cell table:style-name="表格39.A1" office:value-type="string">
            <text:p text:style-name="P31">旋轉方式</text:p>
          </table:table-cell>
          <table:table-cell table:style-name="表格39.A1" office:value-type="string">
            <text:p text:style-name="P31">口訣</text:p>
          </table:table-cell>
        </table:table-row>
        <table:table-row table:style-name="表格39.1">
          <table:table-cell table:style-name="表格39.A2" office:value-type="string">
            <text:p text:style-name="P36">LL</text:p>
          </table:table-cell>
          <table:table-cell table:style-name="表格39.A2" office:value-type="string">
            <text:p text:style-name="P36">失衡節點 BF=+2，左子 BF=+1</text:p>
          </table:table-cell>
          <table:table-cell table:style-name="表格39.A2" office:value-type="string">
            <text:p text:style-name="P36">右旋（一次）</text:p>
          </table:table-cell>
          <table:table-cell table:style-name="表格39.A2" office:value-type="string">
            <text:p text:style-name="P36">LL → 右</text:p>
          </table:table-cell>
        </table:table-row>
        <table:table-row table:style-name="表格39.1">
          <table:table-cell table:style-name="表格39.A3" office:value-type="string">
            <text:p text:style-name="P36">RR</text:p>
          </table:table-cell>
          <table:table-cell table:style-name="表格39.A3" office:value-type="string">
            <text:p text:style-name="P36">失衡節點 BF=−2，右子 BF=−1</text:p>
          </table:table-cell>
          <table:table-cell table:style-name="表格39.A3" office:value-type="string">
            <text:p text:style-name="P36">左旋（一次）</text:p>
          </table:table-cell>
          <table:table-cell table:style-name="表格39.A3" office:value-type="string">
            <text:p text:style-name="P36">RR → 左</text:p>
          </table:table-cell>
        </table:table-row>
        <table:table-row table:style-name="表格39.1">
          <table:table-cell table:style-name="表格39.A2" office:value-type="string">
            <text:p text:style-name="P36">LR</text:p>
          </table:table-cell>
          <table:table-cell table:style-name="表格39.A2" office:value-type="string">
            <text:p text:style-name="P36">失衡節點 BF=+2，左子 BF=−1</text:p>
          </table:table-cell>
          <table:table-cell table:style-name="表格39.A2" office:value-type="string">
            <text:p text:style-name="P36">先左旋左子，再右旋失衡節點</text:p>
          </table:table-cell>
          <table:table-cell table:style-name="表格39.A2" office:value-type="string">
            <text:p text:style-name="P36">LR → 左右</text:p>
          </table:table-cell>
        </table:table-row>
        <table:table-row table:style-name="表格39.1">
          <table:table-cell table:style-name="表格39.A3" office:value-type="string">
            <text:p text:style-name="P36">RL</text:p>
          </table:table-cell>
          <table:table-cell table:style-name="表格39.A3" office:value-type="string">
            <text:p text:style-name="P36">失衡節點 BF=−2，右子 BF=+1</text:p>
          </table:table-cell>
          <table:table-cell table:style-name="表格39.A3" office:value-type="string">
            <text:p text:style-name="P36">先右旋右子，再左旋失衡節點</text:p>
          </table:table-cell>
          <table:table-cell table:style-name="表格39.A3" office:value-type="string">
            <text:p text:style-name="P36">RL → 右左</text:p>
          </table:table-cell>
        </table:table-row>
      </table:table>
      <text:p text:style-name="P30"/>
      <text:h text:style-name="P102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9"><text:span text:style-name="T12">①</text:span><text:span text:style-name="T1"> 每個節點非紅即黑　　</text:span><text:span text:style-name="T12">②</text:span><text:span text:style-name="T1"> 根節點是黑色</text:span></text:p>
            <text:p text:style-name="P29"><text:span text:style-name="T12">③</text:span><text:span text:style-name="T1"> NIL 空節點是黑色　　</text:span><text:span text:style-name="T12">④</text:span><text:span text:style-name="T1"> 紅不能接紅（Red→Red 違規）</text:span></text:p>
            <text:p text:style-name="P29"><text:span text:style-name="T12">⑤</text:span><text:span text:style-name="T1"> 所有路徑的黑高度相同 → 確保 h = O(log n)</text:span></text:p>
          </table:table-cell>
        </table:table-row>
      </table:table>
      <text:p text:style-name="P30"/>
      <text:h text:style-name="P102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66">父節點 = ⌊i/2⌋ <text:s text:c="7"/>左子 = 2i <text:s text:c="7"/>右子 = 2i+1</text:p>
          </table:table-cell>
        </table:table-row>
      </table:table>
      <text:p text:style-name="P30"/>
      <text:h text:style-name="P11" text:outline-level="2">10.6 各題型答題模板</text:h>
      <text:p text:style-name="P110">問：BST vs AVL vs RBT 差在哪？</text:p>
      <text:p text:style-name="P29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30"/>
      <text:p text:style-name="P110">問：為何 RBT 高度是 O(log n)？</text:p>
      <text:p text:style-name="P48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30"/>
      <text:p text:style-name="P110">問：(2,4)-Tree 與 RBT 的關係？</text:p>
      <text:p text:style-name="P48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30"/>
      <text:p text:style-name="Standard"/>
      <text:h text:style-name="P2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7">BST</text:p>
                  <text:p text:style-name="P48">左 &lt; 根 &lt; 右</text:p>
                  <text:p text:style-name="P48">刪除：葉→直刪 / 一子→接上 / 兩子→中序後繼</text:p>
                  <text:p text:style-name="P48">最差 O(n)（有序插入退化）</text:p>
                </table:table-cell>
              </table:table-row>
            </table:table>
            <text:p text:style-name="P30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119">AVL</text:p>
                  <text:p text:style-name="P48">BF = 左高 − 右高，|BF| ≤ 1</text:p>
                  <text:p text:style-name="P48">LL→右旋　RR→左旋</text:p>
                  <text:p text:style-name="P48">LR→左右旋　RL→右左旋</text:p>
                  <text:p text:style-name="P48">高度保證 O(log n)</text:p>
                </table:table-cell>
              </table:table-row>
            </table:table>
            <text:p text:style-name="P30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64">Heap</text:p>
                  <text:p text:style-name="P48">完全二元樹 + 父 ≥ 子（Max Heap）</text:p>
                  <text:p text:style-name="P88">父=i/2　左=2i　右=2i+1</text:p>
                  <text:p text:style-name="P48">插入 O(log n)　取最大 O(1)</text:p>
                  <text:p text:style-name="P48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29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100">RBT（紅黑樹）</text:p>
                  <text:p text:style-name="P48">① 非紅即黑　② 根黑　③ NIL黑</text:p>
                  <text:p text:style-name="P48">④ 紅不接紅　⑤ 黑高度相同</text:p>
                  <text:p text:style-name="P48">高度 h ≤ 2log(n+1) = O(log n)</text:p>
                  <text:p text:style-name="P48">= (2,4)-Tree 的二元表示</text:p>
                </table:table-cell>
              </table:table-row>
            </table:table>
            <text:p text:style-name="P30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145">(2,4)-Tree ↔ RBT</text:p>
                  <text:p text:style-name="P48">2-node = 黑節點</text:p>
                  <text:p text:style-name="P48">3-node = 黑 + 紅</text:p>
                  <text:p text:style-name="P48">4-node = 黑 + 左紅 + 右紅</text:p>
                  <text:p text:style-name="P48">Split = 變色 + 旋轉</text:p>
                </table:table-cell>
              </table:table-row>
            </table:table>
            <text:p text:style-name="P30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109">Priority Queue</text:p>
                  <text:p text:style-name="P48">不是 FIFO，是優先權高先出</text:p>
                  <text:p text:style-name="P48">以 Heap 實作最佳</text:p>
                  <text:p text:style-name="P48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57"/>
      <text:p text:style-name="P18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59</meta:editing-cycles>
    <meta:creation-date>2026-05-30T02:12:46.572000000</meta:creation-date>
    <dc:date>2026-06-26T16:26:03.060000000</dc:date>
    <meta:generator>MODA_ODF_Application_Tools/3.8.4.2$Windows_X86_64 LibreOffice_project/4fb77107d5af14329e08085efe4fa19b5633383a</meta:generator>
    <meta:editing-duration>PT18H59M18S</meta:editing-duration>
    <meta:document-statistic meta:table-count="73" meta:image-count="0" meta:object-count="0" meta:page-count="24" meta:paragraph-count="895" meta:word-count="9026" meta:character-count="15390" meta:non-whitespace-character-count="12387"/>
  </office:meta>
</office:document-meta>
</file>