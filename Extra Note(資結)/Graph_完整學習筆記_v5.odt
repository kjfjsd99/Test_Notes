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7.191cm" fo:margin-left="0.004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" style:family="table">
      <style:table-properties style:width="17.191cm" fo:margin-left="0.004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" style:family="table">
      <style:table-properties style:width="17.191cm" fo:margin-left="0.004cm" fo:margin-top="0cm" fo:margin-bottom="0cm" table:align="left" style:writing-mode="page"/>
    </style:style>
    <style:style style:name="表格3.A" style:family="table-column">
      <style:table-column-properties style:column-width="3.877cm"/>
    </style:style>
    <style:style style:name="表格3.B" style:family="table-column">
      <style:table-column-properties style:column-width="13.314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.B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" style:family="table">
      <style:table-properties style:width="17.191cm" fo:margin-left="0.004cm" fo:margin-top="0cm" fo:margin-bottom="0cm" table:align="left" style:writing-mode="page"/>
    </style:style>
    <style:style style:name="表格4.A" style:family="table-column">
      <style:table-column-properties style:column-width="17.19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5" style:family="table">
      <style:table-properties style:width="17.191cm" fo:margin-left="0.004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6" style:family="table">
      <style:table-properties style:width="17.191cm" fo:margin-left="0.004cm" fo:margin-top="0cm" fo:margin-bottom="0cm" table:align="left" style:writing-mode="page"/>
    </style:style>
    <style:style style:name="表格6.A" style:family="table-column">
      <style:table-column-properties style:column-width="17.19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7" style:family="table">
      <style:table-properties style:width="17.191cm" fo:margin-left="0.004cm" fo:margin-top="0cm" fo:margin-bottom="0cm" table:align="left" style:writing-mode="page"/>
    </style:style>
    <style:style style:name="表格7.A" style:family="table-column">
      <style:table-column-properties style:column-width="17.19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8" style:family="table">
      <style:table-properties style:width="17.191cm" fo:margin-left="0.004cm" fo:margin-top="0cm" fo:margin-bottom="0cm" table:align="left" style:writing-mode="page"/>
    </style:style>
    <style:style style:name="表格8.A" style:family="table-column">
      <style:table-column-properties style:column-width="17.19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9" style:family="table">
      <style:table-properties style:width="17.191cm" fo:margin-left="0.004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0" style:family="table">
      <style:table-properties style:width="17.191cm" fo:margin-left="0.004cm" fo:margin-top="0cm" fo:margin-bottom="0cm" table:align="left" style:writing-mode="page"/>
    </style:style>
    <style:style style:name="表格10.A" style:family="table-column">
      <style:table-column-properties style:column-width="17.19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1" style:family="table">
      <style:table-properties style:width="17.191cm" fo:margin-left="0.004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2" style:family="table">
      <style:table-properties style:width="17.191cm" fo:margin-left="0.004cm" fo:margin-top="0cm" fo:margin-bottom="0cm" table:align="left" style:writing-mode="page"/>
    </style:style>
    <style:style style:name="表格12.A" style:family="table-column">
      <style:table-column-properties style:column-width="17.19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2.11" style:family="table-row">
      <style:table-row-properties style:min-row-height="0.607cm" fo:keep-together="auto"/>
    </style:style>
    <style:style style:name="表格13" style:family="table">
      <style:table-properties style:width="17.191cm" fo:margin-left="0.004cm" fo:margin-top="0cm" fo:margin-bottom="0cm" table:align="left" style:writing-mode="page"/>
    </style:style>
    <style:style style:name="表格13.A" style:family="table-column">
      <style:table-column-properties style:column-width="17.19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4" style:family="table">
      <style:table-properties style:width="17.191cm" fo:margin-left="0.004cm" fo:margin-top="0cm" fo:margin-bottom="0cm" table:align="left" style:writing-mode="page"/>
    </style:style>
    <style:style style:name="表格14.A" style:family="table-column">
      <style:table-column-properties style:column-width="17.19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4.10" style:family="table-row">
      <style:table-row-properties style:min-row-height="0.533cm" fo:keep-together="auto"/>
    </style:style>
    <style:style style:name="表格15" style:family="table">
      <style:table-properties style:width="17.191cm" fo:margin-left="0.004cm" fo:margin-top="0cm" fo:margin-bottom="0cm" table:align="left" style:writing-mode="page"/>
    </style:style>
    <style:style style:name="表格15.A" style:family="table-column">
      <style:table-column-properties style:column-width="17.1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16" style:family="table">
      <style:table-properties style:width="17.191cm" fo:margin-left="0.004cm" fo:margin-top="0cm" fo:margin-bottom="0cm" table:align="left" style:writing-mode="page"/>
    </style:style>
    <style:style style:name="表格16.A" style:family="table-column">
      <style:table-column-properties style:column-width="17.19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ce0f7" fo:padding-left="0.353cm" fo:padding-right="0.353cm" fo:padding-top="0.053cm" fo:padding-bottom="0.053cm" fo:border="0.25pt solid #5a2d82">
        <style:background-image/>
      </style:table-cell-properties>
    </style:style>
    <style:style style:name="表格17" style:family="table">
      <style:table-properties style:width="17.191cm" fo:margin-left="0.004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8" style:family="table">
      <style:table-properties style:width="17.191cm" fo:margin-left="0.004cm" fo:margin-top="0cm" fo:margin-bottom="0cm" table:align="left" style:writing-mode="page"/>
    </style:style>
    <style:style style:name="表格18.A" style:family="table-column">
      <style:table-column-properties style:column-width="17.19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9" style:family="table">
      <style:table-properties style:width="17.191cm" fo:margin-left="0.004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ff5cc" fo:padding-left="0.353cm" fo:padding-right="0.353cm" fo:padding-top="0.053cm" fo:padding-bottom="0.053cm" fo:border="0.25pt solid #7a5a00">
        <style:background-image/>
      </style:table-cell-properties>
    </style:style>
    <style:style style:name="表格20" style:family="table">
      <style:table-properties style:width="17.191cm" fo:margin-left="0.004cm" fo:margin-top="0cm" fo:margin-bottom="0cm" table:align="left" style:writing-mode="page"/>
    </style:style>
    <style:style style:name="表格20.A" style:family="table-column">
      <style:table-column-properties style:column-width="17.19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0.2" style:family="table-row">
      <style:table-row-properties style:min-row-height="0.579cm" fo:keep-together="auto"/>
    </style:style>
    <style:style style:name="表格20.A10" style:family="table-cell">
      <style:table-cell-properties fo:background-color="#d6f0de" fo:padding-left="0.353cm" fo:padding-right="0.353cm" fo:padding-top="0.053cm" fo:padding-bottom="0.053cm" fo:border-left="0.25pt solid #1a7a34" fo:border-right="0.25pt solid #1a7a34" fo:border-top="none" fo:border-bottom="0.25pt solid #1a7a34">
        <style:background-image/>
      </style:table-cell-properties>
    </style:style>
    <style:style style:name="表格21" style:family="table">
      <style:table-properties style:width="17.191cm" fo:margin-left="0.004cm" fo:margin-top="0cm" fo:margin-bottom="0cm" table:align="left" style:writing-mode="page"/>
    </style:style>
    <style:style style:name="表格21.A" style:family="table-column">
      <style:table-column-properties style:column-width="3.351cm"/>
    </style:style>
    <style:style style:name="表格21.B" style:family="table-column">
      <style:table-column-properties style:column-width="3.171cm"/>
    </style:style>
    <style:style style:name="表格21.C" style:family="table-column">
      <style:table-column-properties style:column-width="3.175cm"/>
    </style:style>
    <style:style style:name="表格21.D" style:family="table-column">
      <style:table-column-properties style:column-width="3.612cm"/>
    </style:style>
    <style:style style:name="表格21.E" style:family="table-column">
      <style:table-column-properties style:column-width="3.881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1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1.B2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21.C2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21.E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1.B6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21.C6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22" style:family="table">
      <style:table-properties style:width="17.191cm" fo:margin-left="0.004cm" fo:margin-top="0cm" fo:margin-bottom="0cm" table:align="left" style:writing-mode="page"/>
    </style:style>
    <style:style style:name="表格22.A" style:family="table-column">
      <style:table-column-properties style:column-width="17.19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3" style:family="table">
      <style:table-properties style:width="17.191cm" fo:margin-left="0.004cm" fo:margin-top="0cm" fo:margin-bottom="0cm" table:align="left" style:writing-mode="page"/>
    </style:style>
    <style:style style:name="表格23.A" style:family="table-column">
      <style:table-column-properties style:column-width="17.19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4" style:family="table">
      <style:table-properties style:width="17.191cm" fo:margin-left="0.004cm" fo:margin-top="0cm" fo:margin-bottom="0cm" table:align="left" style:writing-mode="page"/>
    </style:style>
    <style:style style:name="表格24.A" style:family="table-column">
      <style:table-column-properties style:column-width="0.878cm"/>
    </style:style>
    <style:style style:name="表格24.B" style:family="table-column">
      <style:table-column-properties style:column-width="3.881cm"/>
    </style:style>
    <style:style style:name="表格24.C" style:family="table-column">
      <style:table-column-properties style:column-width="5.376cm"/>
    </style:style>
    <style:style style:name="表格24.D" style:family="table-column">
      <style:table-column-properties style:column-width="3.528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4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4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5" style:family="table">
      <style:table-properties style:width="17.191cm" fo:margin-left="0.004cm" fo:margin-top="0cm" fo:margin-bottom="0cm" table:align="left" style:writing-mode="page"/>
    </style:style>
    <style:style style:name="表格25.A" style:family="table-column">
      <style:table-column-properties style:column-width="17.19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26" style:family="table">
      <style:table-properties style:width="17.191cm" fo:margin-left="0.004cm" fo:margin-top="0cm" fo:margin-bottom="0cm" table:align="left" style:writing-mode="page"/>
    </style:style>
    <style:style style:name="表格26.A" style:family="table-column">
      <style:table-column-properties style:column-width="17.19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7" style:family="table">
      <style:table-properties style:width="17.191cm" fo:margin-left="0.004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7.A8" style:family="table-cell">
      <style:table-cell-properties fo:background-color="#f2f4f6" fo:padding-left="0.353cm" fo:padding-right="0.353cm" fo:padding-top="0.053cm" fo:padding-bottom="0.053cm" fo:border-left="0.25pt solid #bbbbbb" fo:border-right="0.25pt solid #bbbbbb" fo:border-top="none" fo:border-bottom="0.25pt solid #bbbbbb">
        <style:background-image/>
      </style:table-cell-properties>
    </style:style>
    <style:style style:name="表格28" style:family="table">
      <style:table-properties style:width="17.191cm" fo:margin-left="0.009cm" fo:margin-top="0cm" fo:margin-bottom="0cm" table:align="left" style:writing-mode="page"/>
    </style:style>
    <style:style style:name="表格28.A" style:family="table-column">
      <style:table-column-properties style:column-width="17.19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9d9d9" fo:padding-left="0.247cm" fo:padding-right="0.247cm" fo:padding-top="0.106cm" fo:padding-bottom="0.106cm" fo:border="0.1pt solid #aaaaaa">
        <style:background-image/>
      </style:table-cell-properties>
    </style:style>
    <style:style style:name="表格54.A2" style:family="table-cell">
      <style:table-cell-properties fo:background-color="#d9d9d9" fo:padding-left="0.282cm" fo:padding-right="0.282cm" fo:padding-top="0.141cm" fo:padding-bottom="0.141cm" fo:border="0.1pt solid #aaaaaa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0eaf5" fo:padding-left="0.247cm" fo:padding-right="0.247cm" fo:padding-top="0.106cm" fo:padding-bottom="0.106cm" fo:border="0.1pt solid #aaaaaa">
        <style:background-image/>
      </style:table-cell-properties>
    </style:style>
    <style:style style:name="表格55.A2" style:family="table-cell">
      <style:table-cell-properties fo:background-color="#d0eaf5" fo:padding-left="0.282cm" fo:padding-right="0.282cm" fo:padding-top="0.141cm" fo:padding-bottom="0.141cm" fo:border="0.1pt solid #aaaaaa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2efda" fo:padding-left="0.247cm" fo:padding-right="0.247cm" fo:padding-top="0.106cm" fo:padding-bottom="0.106cm" fo:border="0.1pt solid #aaaaaa">
        <style:background-image/>
      </style:table-cell-properties>
    </style:style>
    <style:style style:name="表格56.A2" style:family="table-cell">
      <style:table-cell-properties fo:background-color="#e2efda" fo:padding-left="0.282cm" fo:padding-right="0.282cm" fo:padding-top="0.141cm" fo:padding-bottom="0.141cm" fo:border="0.1pt solid #aaaaaa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ce4d6" fo:padding-left="0.247cm" fo:padding-right="0.247cm" fo:padding-top="0.106cm" fo:padding-bottom="0.106cm" fo:border="0.1pt solid #aaaaaa">
        <style:background-image/>
      </style:table-cell-properties>
    </style:style>
    <style:style style:name="表格57.A2" style:family="table-cell">
      <style:table-cell-properties fo:background-color="#fce4d6" fo:padding-left="0.282cm" fo:padding-right="0.282cm" fo:padding-top="0.141cm" fo:padding-bottom="0.141cm" fo:border="0.1pt solid #aaaaaa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4.422cm"/>
    </style:style>
    <style:style style:name="表格58.B" style:family="table-column">
      <style:table-column-properties style:column-width="2.579cm"/>
    </style:style>
    <style:style style:name="表格58.C" style:family="table-column">
      <style:table-column-properties style:column-width="2.581cm"/>
    </style:style>
    <style:style style:name="表格58.D" style:family="table-column">
      <style:table-column-properties style:column-width="6.929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eeaf1" fo:padding-left="0.247cm" fo:padding-right="0.247cm" fo:padding-top="0.106cm" fo:padding-bottom="0.106cm" fo:border="0.1pt solid #aaaaaa">
        <style:background-image/>
      </style:table-cell-properties>
    </style:style>
    <style:style style:name="表格58.A2" style:family="table-cell">
      <style:table-cell-properties fo:background-color="#deeaf1" fo:padding-left="0.176cm" fo:padding-right="0.176cm" fo:padding-top="0.106cm" fo:padding-bottom="0.106cm" fo:border="0.1pt solid #aaaaaa">
        <style:background-image/>
      </style:table-cell-properties>
    </style:style>
    <style:style style:name="表格58.A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16.51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ff2cc" fo:padding-left="0.282cm" fo:padding-right="0.282cm" fo:padding-top="0.141cm" fo:padding-bottom="0.141cm" fo:border="0.1pt solid #aaaaaa">
        <style:background-image/>
      </style:table-cell-properties>
    </style:style>
    <style:style style:name="表格29" style:family="table">
      <style:table-properties style:width="17.191cm" fo:margin-left="0.004cm" fo:margin-top="0cm" fo:margin-bottom="0cm" table:align="left" style:writing-mode="page"/>
    </style:style>
    <style:style style:name="表格29.A" style:family="table-column">
      <style:table-column-properties style:column-width="17.19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0" style:family="table">
      <style:table-properties style:width="17.191cm" fo:margin-left="0.004cm" fo:margin-top="0cm" fo:margin-bottom="0cm" table:align="left" style:writing-mode="page"/>
    </style:style>
    <style:style style:name="表格30.A" style:family="table-column">
      <style:table-column-properties style:column-width="0.878cm"/>
    </style:style>
    <style:style style:name="表格30.B" style:family="table-column">
      <style:table-column-properties style:column-width="4.237cm"/>
    </style:style>
    <style:style style:name="表格30.C" style:family="table-column">
      <style:table-column-properties style:column-width="5.549cm"/>
    </style:style>
    <style:style style:name="表格30.D" style:family="table-column">
      <style:table-column-properties style:column-width="2.999cm"/>
    </style:style>
    <style:style style:name="表格30.E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1" style:family="table">
      <style:table-properties style:width="17.191cm" fo:margin-left="0.004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32" style:family="table">
      <style:table-properties style:width="17.191cm" fo:margin-left="0.004cm" fo:margin-top="0cm" fo:margin-bottom="0cm" table:align="left" style:writing-mode="page"/>
    </style:style>
    <style:style style:name="表格32.A" style:family="table-column">
      <style:table-column-properties style:column-width="17.19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33" style:family="table">
      <style:table-properties style:width="17.191cm" fo:margin-left="0.004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4" style:family="table">
      <style:table-properties style:width="17.191cm" fo:margin-left="0.009cm" fo:margin-top="0cm" fo:margin-bottom="0cm" table:align="left" style:writing-mode="page"/>
    </style:style>
    <style:style style:name="表格34.A" style:family="table-column">
      <style:table-column-properties style:column-width="17.19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35" style:family="table">
      <style:table-properties style:width="17.191cm" fo:margin-left="0.004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6" style:family="table">
      <style:table-properties style:width="12.7cm" fo:margin-left="0.004cm" fo:margin-top="0cm" fo:margin-bottom="0cm" table:align="left" style:writing-mode="page"/>
    </style:style>
    <style:style style:name="表格36.A" style:family="table-column">
      <style:table-column-properties style:column-width="3.528cm"/>
    </style:style>
    <style:style style:name="表格36.B" style:family="table-column">
      <style:table-column-properties style:column-width="4.58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6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6.B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6.C2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36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6.B3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36.B5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37" style:family="table">
      <style:table-properties style:width="17.191cm" fo:margin-left="0.004cm" fo:margin-top="0cm" fo:margin-bottom="0cm" table:align="left" style:writing-mode="page"/>
    </style:style>
    <style:style style:name="表格37.A" style:family="table-column">
      <style:table-column-properties style:column-width="17.19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8" style:family="table">
      <style:table-properties style:width="17.191cm" fo:margin-left="0.004cm" fo:margin-top="0cm" fo:margin-bottom="0cm" table:align="left" style:writing-mode="page"/>
    </style:style>
    <style:style style:name="表格38.A" style:family="table-column">
      <style:table-column-properties style:column-width="17.19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9" style:family="table">
      <style:table-properties style:width="17.191cm" fo:margin-left="0.004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0" style:family="table">
      <style:table-properties style:width="17.191cm" fo:margin-left="0.004cm" fo:margin-top="0cm" fo:margin-bottom="0cm" table:align="left" style:writing-mode="page"/>
    </style:style>
    <style:style style:name="表格40.A" style:family="table-column">
      <style:table-column-properties style:column-width="0.878cm"/>
    </style:style>
    <style:style style:name="表格40.B" style:family="table-column">
      <style:table-column-properties style:column-width="5.373cm"/>
    </style:style>
    <style:style style:name="表格40.C" style:family="table-column">
      <style:table-column-properties style:column-width="3.884cm"/>
    </style:style>
    <style:style style:name="表格40.D" style:family="table-column">
      <style:table-column-properties style:column-width="3.877cm"/>
    </style:style>
    <style:style style:name="表格40.E" style:family="table-column">
      <style:table-column-properties style:column-width="3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4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4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1" style:family="table">
      <style:table-properties style:width="17.191cm" fo:margin-left="0.004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42" style:family="table">
      <style:table-properties style:width="17.191cm" fo:margin-left="0.004cm" fo:margin-top="0cm" fo:margin-bottom="0cm" table:align="left" style:writing-mode="page"/>
    </style:style>
    <style:style style:name="表格42.A" style:family="table-column">
      <style:table-column-properties style:column-width="17.19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43" style:family="table">
      <style:table-properties style:width="17.191cm" fo:margin-left="0.004cm" fo:margin-top="0cm" fo:margin-bottom="0cm" table:align="left" style:writing-mode="page"/>
    </style:style>
    <style:style style:name="表格43.A" style:family="table-column">
      <style:table-column-properties style:column-width="17.19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4" style:family="table">
      <style:table-properties style:width="17.191cm" fo:margin-left="0.004cm" fo:margin-top="0cm" fo:margin-bottom="0cm" table:align="left" style:writing-mode="page"/>
    </style:style>
    <style:style style:name="表格44.A" style:family="table-column">
      <style:table-column-properties style:column-width="0.878cm"/>
    </style:style>
    <style:style style:name="表格44.B" style:family="table-column">
      <style:table-column-properties style:column-width="6.174cm"/>
    </style:style>
    <style:style style:name="表格44.C" style:family="table-column">
      <style:table-column-properties style:column-width="5.549cm"/>
    </style:style>
    <style:style style:name="表格44.D" style:family="table-column">
      <style:table-column-properties style:column-width="2.473cm"/>
    </style:style>
    <style:style style:name="表格44.E" style:family="table-column">
      <style:table-column-properties style:column-width="2.117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0d7b6c" fo:padding-left="0.229cm" fo:padding-right="0.229cm" fo:padding-top="0.141cm" fo:padding-bottom="0.141cm" fo:border="0.25pt solid #bbbbbb">
        <style:background-image/>
      </style:table-cell-properties>
    </style:style>
    <style:style style:name="表格44.A2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44.B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4.B3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44.C3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44.E6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45" style:family="table">
      <style:table-properties style:width="17.191cm" fo:margin-left="0.004cm" fo:margin-top="0cm" fo:margin-bottom="0cm" table:align="left" style:writing-mode="page"/>
    </style:style>
    <style:style style:name="表格45.A" style:family="table-column">
      <style:table-column-properties style:column-width="17.19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46" style:family="table">
      <style:table-properties style:width="17.191cm" fo:margin-left="0.004cm" fo:margin-top="0cm" fo:margin-bottom="0cm" table:align="left" style:writing-mode="page"/>
    </style:style>
    <style:style style:name="表格46.A" style:family="table-column">
      <style:table-column-properties style:column-width="17.19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7" style:family="table">
      <style:table-properties style:width="17.191cm" fo:margin-left="0.004cm" fo:margin-top="0cm" fo:margin-bottom="0cm" table:align="left" style:writing-mode="page"/>
    </style:style>
    <style:style style:name="表格47.A" style:family="table-column">
      <style:table-column-properties style:column-width="17.19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48" style:family="table">
      <style:table-properties style:width="17.191cm" fo:margin-left="0.004cm" fo:margin-top="0cm" fo:margin-bottom="0cm" table:align="left" style:writing-mode="page"/>
    </style:style>
    <style:style style:name="表格48.A" style:family="table-column">
      <style:table-column-properties style:column-width="17.19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49" style:family="table">
      <style:table-properties style:width="17.191cm" fo:margin-left="0.004cm" fo:margin-top="0cm" fo:margin-bottom="0cm" table:align="left" style:writing-mode="page"/>
    </style:style>
    <style:style style:name="表格49.A" style:family="table-column">
      <style:table-column-properties style:column-width="17.19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50" style:family="table">
      <style:table-properties style:width="17.191cm" fo:margin-left="0.004cm" fo:margin-top="0cm" fo:margin-bottom="0cm" table:align="left" style:writing-mode="page"/>
    </style:style>
    <style:style style:name="表格50.A" style:family="table-column">
      <style:table-column-properties style:column-width="17.19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51" style:family="table">
      <style:table-properties style:width="17.191cm" fo:margin-left="0.004cm" fo:margin-top="0cm" fo:margin-bottom="0cm" table:align="left" style:writing-mode="page"/>
    </style:style>
    <style:style style:name="表格51.A" style:family="table-column">
      <style:table-column-properties style:column-width="17.19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52" style:family="table">
      <style:table-properties style:width="17.191cm" fo:margin-left="0.004cm" fo:margin-top="0cm" fo:margin-bottom="0cm" table:align="left" style:writing-mode="page"/>
    </style:style>
    <style:style style:name="表格52.A" style:family="table-column">
      <style:table-column-properties style:column-width="17.19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53" style:family="table">
      <style:table-properties style:width="17.191cm" fo:margin-left="0.004cm" fo:margin-top="0cm" fo:margin-bottom="0cm" table:align="left" style:writing-mode="page"/>
    </style:style>
    <style:style style:name="表格53.A" style:family="table-column">
      <style:table-column-properties style:column-width="4.406cm"/>
    </style:style>
    <style:style style:name="表格53.B" style:family="table-column">
      <style:table-column-properties style:column-width="5.02cm"/>
    </style:style>
    <style:style style:name="表格53.C" style:family="table-column">
      <style:table-column-properties style:column-width="7.765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7a5a00" fo:padding-left="0.229cm" fo:padding-right="0.229cm" fo:padding-top="0.141cm" fo:padding-bottom="0.141cm" fo:border="0.25pt solid #bbbbbb">
        <style:background-image/>
      </style:table-cell-properties>
    </style:style>
    <style:style style:name="表格53.A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53.C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53.A3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53.C3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53.B6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53.B7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53.B10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P1" style:family="paragraph" style:parent-style-name="Standard">
      <style:paragraph-properties fo:margin-top="0.088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4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.212cm" style:contextual-spacing="false"/>
      <style:text-properties officeooo:paragraph-rsid="0043cb14"/>
    </style:style>
    <style:style style:name="P6" style:family="paragraph" style:parent-style-name="Standard">
      <style:text-properties officeooo:paragraph-rsid="0043cb14"/>
    </style:style>
    <style:style style:name="P7" style:family="paragraph" style:parent-style-name="Standard">
      <style:paragraph-properties fo:margin-top="1.235cm" fo:margin-bottom="0.176cm" style:contextual-spacing="false" fo:text-align="center" style:justify-single-word="false"/>
    </style:style>
    <style:style style:name="P8" style:family="paragraph" style:parent-style-name="Standard">
      <style:paragraph-properties fo:margin-top="0.106cm" fo:margin-bottom="0.106cm" style:contextual-spacing="false" fo:text-align="center" style:justify-single-word="false"/>
    </style:style>
    <style:style style:name="P9" style:family="paragraph" style:parent-style-name="Standard">
      <style:paragraph-properties fo:margin-top="0.071cm" fo:margin-bottom="1.058cm" style:contextual-spacing="false"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1" style:family="paragraph" style:parent-style-name="Standard">
      <style:paragraph-properties fo:margin-top="0.529cm" fo:margin-bottom="0.176cm" style:contextual-spacing="false" fo:text-align="center" style:justify-single-word="false" fo:padding-left="0cm" fo:padding-right="0cm" fo:padding-top="0.035cm" fo:padding-bottom="0cm" fo:border-left="none" fo:border-right="none" fo:border-top="0.51pt solid #1e5fa8" fo:border-bottom="none"/>
    </style:style>
    <style:style style:name="P12" style:family="paragraph" style:parent-style-name="Standard">
      <style:paragraph-properties fo:margin-top="0.071cm" fo:margin-bottom="0.071cm" style:contextual-spacing="false"/>
    </style:style>
    <style:style style:name="P13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</style:style>
    <style:style style:name="P14" style:family="paragraph" style:parent-style-name="Standard">
      <style:paragraph-properties fo:margin-top="0cm" fo:margin-bottom="0cm" style:contextual-spacing="fals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6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P17" style:family="paragraph" style:parent-style-name="Standard">
      <style:paragraph-properties fo:margin-top="0.212cm" fo:margin-bottom="0.071cm" style:contextual-spacing="false"/>
    </style:style>
    <style:style style:name="P18" style:family="paragraph" style:parent-style-name="Standard">
      <style:paragraph-properties fo:margin-top="0.106cm" fo:margin-bottom="0.106cm" style:contextual-spacing="false"/>
    </style:style>
    <style:style style:name="P19" style:family="paragraph" style:parent-style-name="Standard">
      <style:paragraph-properties fo:margin-top="0.106cm" fo:margin-bottom="0.106cm" style:contextual-spacing="false"/>
      <style:text-properties officeooo:paragraph-rsid="003f7340"/>
    </style:style>
    <style:style style:name="P20" style:family="paragraph" style:parent-style-name="Standard">
      <style:text-properties style:font-name="Courier New" fo:font-size="10pt" fo:font-weight="bold" officeooo:paragraph-rsid="0043cb14" style:font-name-asian="Courier New1" style:font-size-asian="10pt" style:font-weight-asian="bold" style:font-name-complex="Courier New1" style:font-size-complex="10pt" style:font-weight-complex="bold"/>
    </style:style>
    <style:style style:name="P21" style:family="paragraph" style:parent-style-name="Standard">
      <style:text-properties style:font-name="Courier New" fo:font-size="9pt" officeooo:paragraph-rsid="0043cb14" style:font-name-asian="Courier New1" style:font-size-asian="9pt" style:font-name-complex="Courier New1" style:font-size-complex="9pt"/>
    </style:style>
    <style:style style:name="P22" style:family="paragraph" style:parent-style-name="Standard">
      <style:text-properties style:font-name="Courier New" fo:font-size="9pt" fo:font-weight="bold" officeooo:paragraph-rsid="0043cb14" fo:background-color="#ffff00" style:font-name-asian="Courier New1" style:font-size-asian="9pt" style:font-weight-asian="bold" style:font-name-complex="Courier New1" style:font-size-complex="9pt" style:font-weight-complex="bold"/>
    </style:style>
    <style:style style:name="P23" style:family="paragraph" style:parent-style-name="Standard">
      <style:text-properties style:font-name="Arial" fo:font-size="10pt" fo:font-weight="bold" officeooo:paragraph-rsid="0043cb14" style:font-name-asian="Arial2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text-properties style:font-name="Arial" fo:font-size="10pt" fo:font-weight="normal" officeooo:paragraph-rsid="0043cb14" style:font-name-asian="Arial2" style:font-size-asian="10pt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margin-top="0cm" fo:margin-bottom="0.106cm" style:contextual-spacing="false"/>
    </style:style>
    <style:style style:name="P26" style:family="paragraph" style:parent-style-name="Standard">
      <style:paragraph-properties fo:margin-top="0.318cm" fo:margin-bottom="0.106cm" style:contextual-spacing="false"/>
    </style:style>
    <style:style style:name="P27" style:family="paragraph" style:parent-style-name="Standard">
      <loext:graphic-properties draw:fill="solid" draw:fill-color="#1e5fa8"/>
      <style:paragraph-properties fo:margin-left="0.282cm" fo:margin-right="0cm" fo:margin-top="0.212cm" fo:margin-bottom="0.106cm" style:contextual-spacing="false" fo:text-indent="0cm" style:auto-text-indent="false" fo:background-color="#1e5fa8" fo:padding-left="0.141cm" fo:padding-right="0cm" fo:padding-top="0cm" fo:padding-bottom="0cm" fo:border-left="2.75pt solid #ffffff" fo:border-right="none" fo:border-top="none" fo:border-bottom="none"/>
    </style:style>
    <style:style style:name="P28" style:family="paragraph" style:parent-style-name="Standard">
      <style:text-properties fo:color="#eeeeee" loext:opacity="100%" style:font-name="Courier New" fo:font-size="9pt" fo:font-weight="bold" officeooo:paragraph-rsid="0043cb14" fo:background-color="#ff4081" style:font-name-asian="Courier New1" style:font-size-asian="9pt" style:font-weight-asian="bold" style:font-name-complex="Courier New1" style:font-size-complex="9pt" style:font-weight-complex="bold"/>
    </style:style>
    <style:style style:name="P29" style:family="paragraph" style:parent-style-name="Standard">
      <style:text-properties fo:color="#eeeeee" loext:opacity="100%" style:font-name="Courier New" fo:font-size="9pt" fo:font-weight="bold" officeooo:paragraph-rsid="0043cb14" fo:background-color="#ff5252" style:font-name-asian="Courier New1" style:font-size-asian="9pt" style:font-weight-asian="bold" style:font-name-complex="Courier New1" style:font-size-complex="9pt" style:font-weight-complex="bold"/>
    </style:style>
    <style:style style:name="P30" style:family="paragraph" style:parent-style-name="Standard">
      <style:text-properties fo:color="#eeeeee" loext:opacity="100%" officeooo:paragraph-rsid="0043cb14"/>
    </style:style>
    <style:style style:name="P31" style:family="paragraph" style:parent-style-name="Standard">
      <style:text-properties fo:color="#ff3d00" loext:opacity="100%" style:font-name="Courier New" fo:font-size="9pt" fo:font-weight="bold" officeooo:paragraph-rsid="0043cb14" fo:background-color="#64ffda" style:font-name-asian="Courier New1" style:font-size-asian="9pt" style:font-weight-asian="bold" style:font-name-complex="Courier New1" style:font-size-complex="9pt" style:font-weight-complex="bold"/>
    </style:style>
    <style:style style:name="P32" style:family="paragraph" style:parent-style-name="Standard">
      <style:text-properties fo:color="#c6ff00" loext:opacity="100%" style:font-name="Courier New" fo:font-size="9pt" fo:font-weight="bold" officeooo:paragraph-rsid="0043cb14" fo:background-color="#3d5afe" style:font-name-asian="Courier New1" style:font-size-asian="9pt" style:font-weight-asian="bold" style:font-name-complex="Courier New1" style:font-size-complex="9pt" style:font-weight-complex="bold"/>
    </style:style>
    <style:style style:name="P33" style:family="paragraph" style:parent-style-name="Standard">
      <style:text-properties fo:color="#ffff00" loext:opacity="100%" style:font-name="Courier New" fo:font-size="9pt" fo:font-weight="bold" officeooo:paragraph-rsid="0043cb14" fo:background-color="#ff9100" style:font-name-asian="Courier New1" style:font-size-asian="9pt" style:font-weight-asian="bold" style:font-name-complex="Courier New1" style:font-size-complex="9pt" style:font-weight-complex="bold"/>
    </style:style>
    <style:style style:name="P34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35" style:family="paragraph" style:parent-style-name="Heading_20_1">
      <style:paragraph-properties fo:margin-left="0cm" fo:margin-right="0cm" fo:margin-top="0.564cm" fo:margin-bottom="0.212cm" style:contextual-spacing="false" fo:text-indent="0cm" style:auto-text-indent="false"/>
    </style:style>
    <style:style style:name="P36" style:family="paragraph" style:parent-style-name="Heading_20_2">
      <style:paragraph-properties fo:margin-left="0cm" fo:margin-right="0cm" fo:margin-top="0.388cm" fo:margin-bottom="0.141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1e5fa8"/>
    </style:style>
    <style:style style:name="T1" style:family="text">
      <style:text-properties fo:color="#1e5fa8" loext:opacity="100%" style:font-name="Arial" fo:font-size="21pt" fo:font-weight="bold" style:font-size-asian="21pt" style:font-weight-asian="bold" style:font-name-complex="Arial2" style:font-size-complex="21pt" style:font-weight-complex="bold"/>
    </style:style>
    <style:style style:name="T2" style:family="text">
      <style:text-properties fo:color="#1e5fa8" loext:opacity="100%" style:font-name="Arial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3" style:family="text">
      <style:text-properties fo:color="#1e5fa8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T4" style:family="text">
      <style:text-properties fo:color="#1e5fa8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5" style:family="text">
      <style:text-properties fo:color="#1e5fa8" loext:opacity="100%" style:font-name="Arial" fo:font-size="16pt" fo:font-weight="bold" fo:background-color="#ffd740" loext:char-shading-value="0" style:font-size-asian="16pt" style:font-weight-asian="bold" style:font-name-complex="Arial2" style:font-size-complex="16pt" style:font-weight-complex="bold"/>
    </style:style>
    <style:style style:name="T6" style:family="text">
      <style:text-properties fo:color="#1e5fa8" loext:opacity="100%" style:font-name="Arial" fo:font-size="9.5pt" fo:font-weight="bold" style:font-size-asian="9.5pt" style:font-weight-asian="bold" style:font-name-complex="Arial2" style:font-size-complex="9.5pt" style:font-weight-complex="bold"/>
    </style:style>
    <style:style style:name="T7" style:family="text">
      <style:text-properties fo:color="#1e5fa8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8" style:family="text">
      <style:text-properties fo:color="#1e5fa8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fo:color="#1e5fa8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" style:family="text">
      <style:text-properties fo:color="#1e5fa8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11" style:family="text">
      <style:text-properties fo:color="#1e5fa8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2" style:family="text">
      <style:text-properties fo:color="#1e5fa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3" style:family="text">
      <style:text-properties fo:color="#1e5fa8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14" style:family="text">
      <style:text-properties fo:color="#1e5fa8" loext:opacity="100%" style:font-name="Arial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15" style:family="text">
      <style:text-properties fo:color="#1e5fa8" loext:opacity="100%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16" style:family="text">
      <style:text-properties fo:color="#1e5fa8" loext:opacity="100%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17" style:family="text">
      <style:text-properties fo:color="#1e5fa8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8" style:family="text">
      <style:text-properties fo:color="#1e5fa8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9" style:family="text">
      <style:text-properties fo:color="#0d7b6c" loext:opacity="100%" fo:font-size="11.5pt" style:font-name-asian="Arial2" style:font-size-asian="11.5pt" style:font-name-complex="Arial2" style:font-size-complex="11.5pt"/>
    </style:style>
    <style:style style:name="T20" style:family="text">
      <style:text-properties fo:color="#0d7b6c" loext:opacity="100%" style:font-name="Arial" fo:font-size="11.5pt" style:font-name-asian="Arial2" style:font-size-asian="11.5pt" style:font-name-complex="Arial2" style:font-size-complex="11.5pt"/>
    </style:style>
    <style:style style:name="T21" style:family="text">
      <style:text-properties fo:color="#0d7b6c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22" style:family="text">
      <style:text-properties fo:color="#0d7b6c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23" style:family="text">
      <style:text-properties fo:color="#0d7b6c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24" style:family="text">
      <style:text-properties fo:color="#0d7b6c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5" style:family="text">
      <style:text-properties fo:color="#0d7b6c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26" style:family="text">
      <style:text-properties fo:color="#0d7b6c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7" style:family="text">
      <style:text-properties fo:color="#0d7b6c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28" style:family="text">
      <style:text-properties fo:color="#0d7b6c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9" style:family="text">
      <style:text-properties fo:color="#0d7b6c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30" style:family="text">
      <style:text-properties fo:color="#404040" loext:opacity="100%" style:font-name="Arial" fo:font-size="9.5pt" fo:font-style="italic" style:font-size-asian="9.5pt" style:font-style-asian="italic" style:font-name-complex="Arial2" style:font-size-complex="9.5pt" style:font-style-complex="italic"/>
    </style:style>
    <style:style style:name="T31" style:family="text">
      <style:text-properties fo:color="#404040" loext:opacity="100%" style:font-name="Arial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32" style:family="text">
      <style:text-properties fo:color="#404040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33" style:family="text">
      <style:text-properties fo:color="#404040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34" style:family="text">
      <style:text-properties fo:color="#40404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35" style:family="text">
      <style:text-properties fo:color="#40404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36" style:family="text">
      <style:text-properties fo:color="#40404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7" style:family="text">
      <style:text-properties fo:color="#404040" loext:opacity="100%" style:font-name="Arial" fo:font-size="9pt" fo:font-style="italic" style:font-size-asian="9pt" style:font-style-asian="italic" style:font-name-complex="Arial2" style:font-size-complex="9pt" style:font-style-complex="italic"/>
    </style:style>
    <style:style style:name="T38" style:family="text">
      <style:text-properties fo:color="#404040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39" style:family="text">
      <style:text-properties fo:color="#404040" loext:opacity="100%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40" style:family="text">
      <style:text-properties fo:color="#404040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41" style:family="text">
      <style:text-properties fo:color="#40404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2" style:family="text">
      <style:text-properties fo:color="#404040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43" style:family="text">
      <style:text-properties fo:color="#404040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44" style:family="text"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T45" style:family="text">
      <style:text-properties fo:color="#404040" loext:opacity="100%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46" style:family="text">
      <style:text-properties fo:color="#ff1744" loext:opacity="100%" fo:font-size="9.5pt" fo:font-weight="bold" fo:background-color="#ffff00" loext:char-shading-value="0" style:font-name-asian="Arial2" style:font-size-asian="9.5pt" style:font-weight-asian="bold" style:font-name-complex="Arial2" style:font-size-complex="9.5pt" style:font-weight-complex="bold"/>
    </style:style>
    <style:style style:name="T47" style:family="text"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T48" style:family="text">
      <style:text-properties fo:color="#0d2b5e" loext:opacity="100%" style:font-name="Courier New" fo:font-size="9pt" fo:font-weight="bold" fo:background-color="#00e676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9" style:family="text">
      <style:text-properties fo:color="#0d2b5e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0" style:family="text">
      <style:text-properties fo:color="#0d2b5e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1" style:family="text">
      <style:text-properties fo:color="#0d2b5e" loext:opacity="100%" style:font-name="Courier New" fo:font-size="9pt" fo:font-weight="bold" fo:background-color="#18f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2" style:family="text">
      <style:text-properties fo:color="#0d2b5e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3" style:family="text">
      <style:text-properties fo:color="#0d2b5e" loext:opacity="100%" style:font-name="Courier New" fo:font-size="9pt" fo:font-weight="bold" fo:background-color="#ffc4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4" style:family="text">
      <style:text-properties fo:color="#18ffff" loext:opacity="100%"/>
    </style:style>
    <style:style style:name="T55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56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57" style:family="text">
      <style:text-properties fo:color="#18ffff" loext:opacity="100%" style:font-name="Arial" fo:font-size="9.5pt" fo:font-weight="bold" fo:background-color="#d500f9" loext:char-shading-value="0" style:font-size-asian="9.5pt" style:font-weight-asian="bold" style:font-name-complex="Arial2" style:font-size-complex="9.5pt" style:font-weight-complex="bold"/>
    </style:style>
    <style:style style:name="T58" style:family="text">
      <style:text-properties fo:color="#18ffff" loext:opacity="100%" style:font-name="Arial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59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60" style:family="text">
      <style:text-properties fo:color="#18ffff" loext:opacity="100%" fo:font-size="9.5pt" fo:font-weight="bold" fo:background-color="#d500f9" loext:char-shading-value="0" style:font-name-asian="Arial2" style:font-size-asian="9.5pt" style:font-weight-asian="bold" style:font-name-complex="Arial2" style:font-size-complex="9.5pt" style:font-weight-complex="bold"/>
    </style:style>
    <style:style style:name="T61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2" style:family="text">
      <style:text-properties fo:color="#18ffff" loext:opacity="100%" fo:background-color="#d500f9" loext:char-shading-value="0"/>
    </style:style>
    <style:style style:name="T63" style:family="text">
      <style:text-properties fo:color="#18ffff" loext:opacity="100%" fo:background-color="#d500f9" loext:char-shading-value="0"/>
    </style:style>
    <style:style style:name="T6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65" style:family="text">
      <style:text-properties fo:color="#c6ff00" loext:opacity="100%"/>
    </style:style>
    <style:style style:name="T66" style:family="text">
      <style:text-properties fo:color="#c6ff00" loext:opacity="100%" fo:font-size="10pt" fo:font-weight="bold" fo:background-color="#f50057" loext:char-shading-value="0" style:font-name-asian="Arial2" style:font-size-asian="10pt" style:font-weight-asian="bold" style:font-name-complex="Arial2" style:font-size-complex="10pt" style:font-weight-complex="bold"/>
    </style:style>
    <style:style style:name="T67" style:family="text">
      <style:text-properties fo:color="#c6ff00" loext:opacity="100%" fo:font-size="10pt" fo:font-weight="bold" fo:background-color="#1a237e" loext:char-shading-value="0" style:font-name-asian="Arial2" style:font-size-asian="10pt" style:font-weight-asian="bold" style:font-name-complex="Arial2" style:font-size-complex="10pt" style:font-weight-complex="bold"/>
    </style:style>
    <style:style style:name="T68" style:family="text">
      <style:text-properties fo:color="#c6ff00" loext:opacity="100%" style:font-name="Arial" fo:font-size="10pt" fo:font-weight="bold" fo:background-color="#f50057" loext:char-shading-value="0" style:font-size-asian="10pt" style:font-weight-asian="bold" style:font-name-complex="Arial2" style:font-size-complex="10pt" style:font-weight-complex="bold"/>
    </style:style>
    <style:style style:name="T69" style:family="text">
      <style:text-properties fo:color="#c6ff00" loext:opacity="100%" style:font-name="Arial" fo:font-size="10pt" fo:font-weight="bold" fo:background-color="#1a237e" loext:char-shading-value="0" style:font-size-asian="10pt" style:font-weight-asian="bold" style:font-name-complex="Arial2" style:font-size-complex="10pt" style:font-weight-complex="bold"/>
    </style:style>
    <style:style style:name="T70" style:family="text">
      <style:text-properties fo:color="#c6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1" style:family="text">
      <style:text-properties fo:color="#c6ff0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2" style:family="text">
      <style:text-properties fo:color="#c6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3" style:family="text">
      <style:text-properties fo:color="#c6ff00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4" style:family="text">
      <style:text-properties fo:color="#c6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5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76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77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78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79" style:family="text">
      <style:text-properties fo:color="#c6ff00" loext:opacity="100%" fo:font-weight="bold" fo:background-color="#ffff00" loext:char-shading-value="0" style:font-weight-asian="bold" style:font-weight-complex="bold"/>
    </style:style>
    <style:style style:name="T80" style:family="text">
      <style:text-properties fo:color="#c6ff00" loext:opacity="100%" fo:background-color="#3d5afe" loext:char-shading-value="0"/>
    </style:style>
    <style:style style:name="T81" style:family="text">
      <style:text-properties fo:color="#c6ff00" loext:opacity="100%" fo:background-color="#f50057" loext:char-shading-value="0"/>
    </style:style>
    <style:style style:name="T82" style:family="text">
      <style:text-properties fo:color="#c6ff00" loext:opacity="100%" fo:background-color="#f50057" loext:char-shading-value="0"/>
    </style:style>
    <style:style style:name="T83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84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85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6" style:family="text">
      <style:text-properties fo:color="#ff3d00" loext:opacity="100%" style:font-name="Courier New" fo:font-size="9pt" fo:font-weight="bold" fo:background-color="#ffcdd2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7" style:family="text">
      <style:text-properties fo:color="#ff3d00" loext:opacity="100%" fo:background-color="#64ffda" loext:char-shading-value="0"/>
    </style:style>
    <style:style style:name="T88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89" style:family="text">
      <style:text-properties fo:color="#ffff00" loext:opacity="100%"/>
    </style:style>
    <style:style style:name="T90" style:family="text">
      <style:text-properties fo:color="#ff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1" style:family="text">
      <style:text-properties fo:color="#ff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2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3" style:family="text">
      <style:text-properties fo:color="#ffff00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4" style:family="text">
      <style:text-properties fo:color="#ff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5" style:family="text">
      <style:text-properties fo:color="#ffff0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6" style:family="text">
      <style:text-properties fo:color="#ffff0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98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99" style:family="text">
      <style:text-properties fo:color="#ffff00" loext:opacity="100%" fo:background-color="#3d5afe" loext:char-shading-value="0"/>
    </style:style>
    <style:style style:name="T100" style:family="text">
      <style:text-properties fo:color="#ffff00" loext:opacity="100%" fo:background-color="#3d5afe" loext:char-shading-value="0"/>
    </style:style>
    <style:style style:name="T101" style:family="text">
      <style:text-properties fo:color="#00e676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2" style:family="text">
      <style:text-properties fo:color="#00e676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3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4" style:family="text">
      <style:text-properties fo:color="#00e676" loext:opacity="100%" style:font-name="Courier New" fo:font-size="9pt" style:font-name-asian="Courier New1" style:font-size-asian="9pt" style:font-name-complex="Courier New1" style:font-size-complex="9pt"/>
    </style:style>
    <style:style style:name="T105" style:family="text">
      <style:text-properties fo:color="#00e676" loext:opacity="100%" fo:font-size="10pt" fo:font-weight="bold" fo:background-color="#5d4037" loext:char-shading-value="0" style:font-name-asian="Arial2" style:font-size-asian="10pt" style:font-weight-asian="bold" style:font-name-complex="Arial2" style:font-size-complex="10pt" style:font-weight-complex="bold"/>
    </style:style>
    <style:style style:name="T106" style:family="text">
      <style:text-properties fo:color="#ffd740" loext:opacity="100%"/>
    </style:style>
    <style:style style:name="T107" style:family="text">
      <style:text-properties fo:color="#ffd74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8" style:family="text">
      <style:text-properties fo:color="#ffd74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9" style:family="text">
      <style:text-properties fo:color="#ffd74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0" style:family="text">
      <style:text-properties fo:color="#ffd740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111" style:family="text">
      <style:text-properties fo:color="#ffd740" loext:opacity="100%" fo:background-color="#000000" loext:char-shading-value="0"/>
    </style:style>
    <style:style style:name="T112" style:family="text">
      <style:text-properties fo:color="#ffd740" loext:opacity="100%" fo:background-color="#000000" loext:char-shading-value="0"/>
    </style:style>
    <style:style style:name="T113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14" style:family="text">
      <style:text-properties fo:color="#76ff03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5" style:family="text">
      <style:text-properties fo:color="#76ff03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6" style:family="text">
      <style:text-properties fo:color="#76ff03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7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118" style:family="text">
      <style:text-properties fo:color="#eeff41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9" style:family="text">
      <style:text-properties fo:color="#ff5252" loext:opacity="100%"/>
    </style:style>
    <style:style style:name="T120" style:family="text">
      <style:text-properties fo:color="#ff5252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1" style:family="text">
      <style:text-properties fo:color="#ff4081" loext:opacity="100%"/>
    </style:style>
    <style:style style:name="T122" style:family="text">
      <style:text-properties fo:color="#ff4081" loext:opacity="100%" style:font-name="Courier New" fo:font-size="9pt" fo:font-weight="bold" fo:background-color="#f8bbd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3" style:family="text">
      <style:text-properties fo:color="#ff4081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4" style:family="text">
      <style:text-properties fo:color="#ff4081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5" style:family="text">
      <style:text-properties fo:color="#ff4081" loext:opacity="100%" fo:font-weight="bold" style:font-weight-asian="bold" style:font-weight-complex="bold"/>
    </style:style>
    <style:style style:name="T126" style:family="text">
      <style:text-properties fo:color="#ff4081" loext:opacity="100%" fo:font-weight="bold" fo:background-color="#f8bbd0" loext:char-shading-value="0" style:font-weight-asian="bold" style:font-weight-complex="bold"/>
    </style:style>
    <style:style style:name="T127" style:family="text">
      <style:text-properties fo:color="#ff4081" loext:opacity="100%" fo:font-weight="bold" fo:background-color="#f8bbd0" loext:char-shading-value="0" style:font-weight-asian="bold" style:font-weight-complex="bold"/>
    </style:style>
    <style:style style:name="T128" style:family="text">
      <style:text-properties fo:color="#ff4081" loext:opacity="100%" fo:font-weight="bold" fo:background-color="#fce4ec" loext:char-shading-value="0" style:font-weight-asian="bold" style:font-weight-complex="bold"/>
    </style:style>
    <style:style style:name="T129" style:family="text">
      <style:text-properties fo:color="#eeeeee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0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31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2" style:family="text">
      <style:text-properties fo:color="#ffffff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133" style:family="text">
      <style:text-properties fo:color="#ffffff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34" style:family="text">
      <style:text-properties fo:color="#ffffff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5" style:family="text">
      <style:text-properties fo:color="#c750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6" style:family="text">
      <style:text-properties fo:color="#c750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7" style:family="text">
      <style:text-properties fo:color="#c7500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38" style:family="text">
      <style:text-properties fo:color="#c75000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39" style:family="text">
      <style:text-properties fo:color="#c750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40" style:family="text">
      <style:text-properties fo:color="#1a7a34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1" style:family="text">
      <style:text-properties fo:color="#1a7a3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42" style:family="text">
      <style:text-properties fo:color="#1a7a3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3" style:family="text">
      <style:text-properties fo:color="#1a7a34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44" style:family="text">
      <style:text-properties fo:color="#1a7a3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45" style:family="text">
      <style:text-properties fo:color="#7b3f00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46" style:family="text">
      <style:text-properties fo:color="#6b2e00" loext:opacity="100%" style:font-name="Courier New" fo:font-size="9pt" fo:font-weight="bold" style:font-name-asian="Courier New1" style:font-size-asian="9pt" style:font-weight-asian="bold" style:font-name-complex="Courier New1" style:font-size-complex="9pt" style:font-weight-complex="bold"/>
    </style:style>
    <style:style style:name="T147" style:family="text">
      <style:text-properties fo:color="#6b2e00" loext:opacity="100%" style:font-name="Courier New" fo:font-size="9pt" style:font-name-asian="Courier New1" style:font-size-asian="9pt" style:font-name-complex="Courier New1" style:font-size-complex="9pt"/>
    </style:style>
    <style:style style:name="T148" style:family="text">
      <style:text-properties fo:color="#7a5a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9" style:family="text">
      <style:text-properties fo:color="#7a5a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50" style:family="text">
      <style:text-properties fo:color="#7a5a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51" style:family="text">
      <style:text-properties fo:font-weight="bold" fo:background-color="#ffd740" loext:char-shading-value="0" style:font-weight-asian="bold" style:font-weight-complex="bold"/>
    </style:style>
    <style:style style:name="T152" style:family="text">
      <style:text-properties fo:font-weight="bold" fo:background-color="#ffd740" loext:char-shading-value="0" style:font-weight-asian="bold" style:font-weight-complex="bold"/>
    </style:style>
    <style:style style:name="T153" style:family="text">
      <style:text-properties fo:font-weight="bold" fo:background-color="#ff4081" loext:char-shading-value="0" style:font-weight-asian="bold" style:font-weight-complex="bold"/>
    </style:style>
    <style:style style:name="T154" style:family="text">
      <style:text-properties fo:font-weight="bold" fo:background-color="#ffff00" loext:char-shading-value="0" style:font-weight-asian="bold" style:font-weight-complex="bold"/>
    </style:style>
    <style:style style:name="T155" style:family="text">
      <style:text-properties fo:font-weight="bold" fo:background-color="#76ff03" loext:char-shading-value="0" style:font-weight-asian="bold" style:font-weight-complex="bold"/>
    </style:style>
    <style:style style:name="T156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57" style:family="text">
      <style:text-properties style:font-name="Courier New" fo:font-size="9pt" fo:background-color="#ffff00" loext:char-shading-value="0" style:font-name-asian="Courier New1" style:font-size-asian="9pt" style:font-name-complex="Courier New1" style:font-size-complex="9pt"/>
    </style:style>
    <style:style style:name="T158" style:family="text">
      <style:text-properties style:font-name="Courier New" fo:font-size="9pt" fo:background-color="#ffff00" loext:char-shading-value="0" style:font-name-asian="Courier New1" style:font-size-asian="9pt" style:font-name-complex="Courier New1" style:font-size-complex="9pt"/>
    </style:style>
    <style:style style:name="T159" style:family="text">
      <style:text-properties fo:background-color="#000000" loext:char-shading-value="0"/>
    </style:style>
    <style:style style:name="T160" style:family="text">
      <style:text-properties fo:background-color="#000000" loext:char-shading-value="0"/>
    </style:style>
    <style:style style:name="T161" style:family="text">
      <style:text-properties fo:color="#64ffda" loext:opacity="100%"/>
    </style:style>
    <style:style style:name="T162" style:family="text">
      <style:text-properties fo:color="#448aff" loext:opacity="100%"/>
    </style:style>
    <style:style style:name="T163" style:family="text">
      <style:text-properties fo:color="#2979ff" loext:opacity="100%"/>
    </style:style>
    <style:style style:name="T164" style:family="text">
      <style:text-properties fo:background-color="#ffff00" loext:char-shading-value="0"/>
    </style:style>
    <style:style style:name="T165" style:family="text">
      <style:text-properties fo:background-color="#ffff00" loext:char-shading-value="0"/>
    </style:style>
    <style:style style:name="T166" style:family="text">
      <style:text-properties fo:background-color="#ffd740" loext:char-shading-value="0"/>
    </style:style>
    <style:style style:name="T167" style:family="text">
      <style:text-properties fo:background-color="#ffd740" loext:char-shading-value="0"/>
    </style:style>
    <style:style style:name="T168" style:family="text">
      <style:text-properties fo:background-color="#ff4081" loext:char-shading-value="0"/>
    </style:style>
    <style:style style:name="T169" style:family="text">
      <style:text-properties fo:background-color="#ff4081" loext:char-shading-value="0"/>
    </style:style>
    <style:style style:name="T170" style:family="text">
      <style:text-properties fo:background-color="#76ff03" loext:char-shading-value="0"/>
    </style:style>
    <style:style style:name="T171" style:family="text">
      <style:text-properties fo:background-color="#76ff03" loext:char-shading-value="0"/>
    </style:style>
    <style:style style:name="T172" style:family="text">
      <style:text-properties fo:background-color="#64ffda" loext:char-shading-value="0"/>
    </style:style>
    <style:style style:name="T173" style:family="text">
      <style:text-properties fo:background-color="#64ffda" loext:char-shading-value="0"/>
    </style:style>
    <style:style style:name="T174" style:family="text">
      <style:text-properties fo:background-color="#3d5afe" loext:char-shading-value="0"/>
    </style:style>
    <style:style style:name="T175" style:family="text">
      <style:text-properties fo:background-color="#3d5afe" loext:char-shading-value="0"/>
    </style:style>
    <style:style style:name="T176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177" style:family="text">
      <style:text-properties fo:color="#ff6e40" loext:opacity="100%" fo:background-color="#64ffda" loext:char-shading-value="0"/>
    </style:style>
    <style:style style:name="T178" style:family="text">
      <style:text-properties fo:color="#ff6e40" loext:opacity="100%" fo:font-weight="bold" fo:background-color="#64ffda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2"><text:span text:style-name="T1">圖形 </text:span><text:span text:style-name="T15">(Graph) </text:span><text:span text:style-name="T1">完整學習筆記</text:span></text:p>
      <text:p text:style-name="P8" loext:marker-style-name="T20"><text:span text:style-name="T19">BFS · DFS · Topological Sort · Prim MST · Adjacency Multilist</text:span><text:span text:style-name="T20"/></text:p>
      <text:p text:style-name="P9" loext:marker-style-name="T31"><text:span text:style-name="T30">含完整圖解 </text:span><text:span text:style-name="T39">· </text:span><text:span text:style-name="T30">演算法逐步追蹤 </text:span><text:span text:style-name="T39">· </text:span><text:span text:style-name="T30">時間</text:span><text:span text:style-name="T39">/</text:span><text:span text:style-name="T30">空間複雜度推導 </text:span><text:span text:style-name="T39">· </text:span><text:span text:style-name="T30">考試申論題</text:span></text:p>
      <text:p text:style-name="Standard"/>
      <text:h text:style-name="P34" text:outline-level="1" loext:marker-style-name="T4"><text:span text:style-name="T3">一、</text:span><text:span text:style-name="T4">Graph</text:span><text:span text:style-name="T3">（圖）基本概念與圖示</text:span></text:h>
      <text:p text:style-name="P12" loext:marker-style-name="T33"><text:span text:style-name="T40">Graph = </text:span><text:span text:style-name="T32">頂點（</text:span><text:span text:style-name="T40">Vertex</text:span><text:span text:style-name="T32">）</text:span><text:span text:style-name="T40">+ </text:span><text:span text:style-name="T32">邊（</text:span><text:span text:style-name="T40">Edge</text:span><text:span text:style-name="T32">）的集合，用來表示元素之間的關係。</text:span></text:p>
      <text:p text:style-name="P1"/>
      <text:p text:style-name="P13" loext:marker-style-name="T7"><text:span text:style-name="T16"><text:s text:c="2"/>▎ </text:span><text:span text:style-name="T6">無向圖（</text:span><text:span text:style-name="T46">Undirected Graph</text:span><text:span text:style-name="T6">）範例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" loext:marker-style-name="T47"><text:span text:style-name="T47"><text:s text:c="7"/>A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6"/>/ \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5"/>/ <text:s text:c="2"/>\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B-----C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|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4"/>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/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頂點（Vertex）：A B C 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邊 <text:s/>（Edge） <text:s/>：A-B <text:s/>A-C <text:s/>B-C <text:s/>B-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2" loext:marker-style-name="T47"><text:span text:style-name="T47"><text:s text:c="2"/></text:span><text:span text:style-name="T48">B 的 Degree <text:s text:c="2"/>= 3</text:span><text:span text:style-name="T47">（連到 A、C、D）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有向圖（</text:span><text:span text:style-name="T46">Directed Graph</text:span><text:span text:style-name="T6">）與 </text:span><text:span text:style-name="T16">DAG </text:span><text:span text:style-name="T6">範例</text:span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" loext:marker-style-name="T47"><text:span text:style-name="T47"><text:s text:c="7"/>A ──→ B ──→ D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│ <text:s text:c="8"/>↗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↓ <text:s text:c="6"/>╱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7"/>C ────╱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/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A→B <text:s/>A→C <text:s/>B→D <text:s/>C→D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</text:span><text:span text:style-name="T49">in-degree(A)=0</text:span><text:span text:style-name="T47"> <text:s/></text:span><text:span text:style-name="T49">in-degree(B)=1</text:span><text:span text:style-name="T47"> <text:s/></text:span><text:span text:style-name="T49">in-degree(C)=1</text:span><text:span text:style-name="T47"> <text:s/></text:span><text:span text:style-name="T49">in-degree(D)=2</text:span></text:p>
          </table:table-cell>
        </table:table-row>
        <table:table-row table:style-name="表格2.1">
          <table:table-cell table:style-name="表格2.A1" office:value-type="string">
            <text:p text:style-name="P2" loext:marker-style-name="T47"><text:span text:style-name="T47"><text:s text:c="2"/>此圖無 Cycle → 是 DAG（有向無環圖）</text:span><text:span text:style-name="T47"/></text:p>
          </table:table-cell>
        </table:table-row>
      </table:table>
      <text:p text:style-name="P1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3" loext:marker-style-name="T9"><text:span text:style-name="T8">專有名詞</text:span><text:span text:style-name="T9"/></text:p>
          </table:table-cell>
          <table:table-cell table:style-name="表格3.A1" office:value-type="string">
            <text:p text:style-name="P3" loext:marker-style-name="T9"><text:span text:style-name="T8">說明</text:span><text:span text:style-name="T9"/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Vertex</text:span><text:span text:style-name="T8">（頂點）</text:span></text:p>
          </table:table-cell>
          <table:table-cell table:style-name="表格3.B2" office:value-type="string">
            <text:p text:style-name="P3" loext:marker-style-name="T33"><text:span text:style-name="T32">圖中每個節點。例：城市、課程、工作項目</text:span><text:span text:style-name="T33"/></text:p>
          </table:table-cell>
        </table:table-row>
        <table:table-row table:style-name="表格3.1">
          <table:table-cell table:style-name="表格3.B2" office:value-type="string">
            <text:p text:style-name="P3" loext:marker-style-name="T9"><text:span text:style-name="T17">Edge</text:span><text:span text:style-name="T8">（邊）</text:span></text:p>
          </table:table-cell>
          <table:table-cell table:style-name="表格3.B2" office:value-type="string">
            <text:p text:style-name="P3" loext:marker-style-name="T33"><text:span text:style-name="T32">頂點之間的連線。有向邊有箭頭方向，無向邊雙向皆可</text:span><text:span text:style-name="T33"/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Degree</text:span><text:span text:style-name="T9"/></text:p>
          </table:table-cell>
          <table:table-cell table:style-name="表格3.B2" office:value-type="string">
            <text:p text:style-name="P3" loext:marker-style-name="T33"><text:span text:style-name="T32">一個頂點連接的邊數。有向圖分</text:span><text:span text:style-name="T55"> </text:span><text:span text:style-name="T59">in-degree</text:span><text:span text:style-name="T55">（進入）</text:span><text:span text:style-name="T32">與 </text:span><text:span text:style-name="T66">out-degree</text:span><text:span text:style-name="T68">（離開）</text:span></text:p>
          </table:table-cell>
        </table:table-row>
        <table:table-row table:style-name="表格3.1">
          <table:table-cell table:style-name="表格3.B2" office:value-type="string">
            <text:p text:style-name="P3" loext:marker-style-name="T9"><text:span text:style-name="T17">DAG</text:span><text:span text:style-name="T9"/></text:p>
          </table:table-cell>
          <table:table-cell table:style-name="表格3.B2" office:value-type="string">
            <text:p text:style-name="P3" loext:marker-style-name="T33"><text:span text:style-name="T40">Directed Acyclic Graph</text:span><text:span text:style-name="T32">，有向無環圖，</text:span><text:span text:style-name="T40">Topological Sort </text:span><text:span text:style-name="T32">的前提條件</text:span></text:p>
          </table:table-cell>
        </table:table-row>
        <table:table-row table:style-name="表格3.1">
          <table:table-cell table:style-name="表格3.A2" office:value-type="string">
            <text:p text:style-name="P3" loext:marker-style-name="T9"><text:span text:style-name="T17">Sparse / Dense</text:span><text:span text:style-name="T9"/></text:p>
          </table:table-cell>
          <table:table-cell table:style-name="表格3.B2" office:value-type="string">
            <text:p text:style-name="P3" loext:marker-style-name="T33"><text:span text:style-name="T32">稀疏圖：邊少（</text:span><text:span text:style-name="T40">|E| ≪ V²</text:span><text:span text:style-name="T32">）；稠密圖：邊多（</text:span><text:span text:style-name="T40">|E| </text:span><text:span text:style-name="T32">接近 </text:span><text:span text:style-name="T40">V²</text:span><text:span text:style-name="T32">）</text:span></text:p>
          </table:table-cell>
        </table:table-row>
      </table:table>
      <text:p text:style-name="Standard"/>
      <text:h text:style-name="P34" text:outline-level="1" loext:marker-style-name="T4"><text:span text:style-name="T3">二、圖的三種表示法（含完整圖解）</text:span><text:span text:style-name="T4"/></text:h>
      <text:h text:style-name="P36" text:outline-level="2" loext:marker-style-name="T12"><text:span text:style-name="T12">2-1 Adjacency Matrix</text:span><text:span text:style-name="T13">（</text:span><text:span text:style-name="T14">相鄰矩陣</text:span><text:span text:style-name="T13">）</text:span></text:h>
      <text:p text:style-name="P12" loext:marker-style-name="T33"><text:span text:style-name="T34">把圖</text:span><text:span text:style-name="T83">轉成一張 </text:span><text:span text:style-name="T84">V×V </text:span><text:span text:style-name="T83">的二維表格</text:span><text:span text:style-name="T32">，</text:span><text:span text:style-name="T55">兩點有邊填 </text:span><text:span text:style-name="T59">1</text:span><text:span text:style-name="T55">（或權重）</text:span><text:span text:style-name="T32">，</text:span><text:span text:style-name="T69">無邊填 </text:span><text:span text:style-name="T67">0</text:span><text:span text:style-name="T32">。</text:span></text:p>
      <text:p text:style-name="P1"/>
      <text:p text:style-name="P13" loext:marker-style-name="T7"><text:span text:style-name="T16"><text:s text:c="2"/>▎ </text:span><text:span text:style-name="T6">建構過程圖解（以 </text:span><text:span text:style-name="T16">A-B</text:span><text:span text:style-name="T6">、</text:span><text:span text:style-name="T16">A-C</text:span><text:span text:style-name="T6">、</text:span><text:span text:style-name="T16">B-C </text:span><text:span text:style-name="T6">三條邊為例）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" loext:marker-style-name="T47"><text:span text:style-name="T47"><text:s text:c="2"/>圖形： <text:s text:c="19"/>轉成矩陣：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30"/>A <text:s/>B <text:s/>C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A ─── B <text:s text:c="13"/>A <text:s/>[ 0 <text:s/>1 <text:s/>1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5"/>\ <text:s text:c="2"/>/ <text:s text:c="14"/>B <text:s/>[ 1 <text:s/>0 <text:s/>1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6"/>\ / <text:s text:c="15"/>C <text:s/>[ 1 <text:s/>1 <text:s/>0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7"/>C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/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2"/>規則：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A-B 有邊</text:span><text:span text:style-name="T47"> <text:s/>→ <text:s/></text:span><text:span text:style-name="T50">matrix[A][B]=1 且 matrix[B][A]=1</text:span><text:span text:style-name="T47"> <text:s/>（無向圖對稱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A-C 有邊</text:span><text:span text:style-name="T47"> <text:s/>→ <text:s/></text:span><text:span text:style-name="T50">matrix[A][C]=1 且 matrix[C][A]=1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</text:span><text:span text:style-name="T49">B-C 有邊</text:span><text:span text:style-name="T47"> <text:s/>→ <text:s/></text:span><text:span text:style-name="T50">matrix[B][C]=1 且 matrix[C][B]=1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7"><text:span text:style-name="T47"><text:s text:c="4"/>對角線 <text:s text:c="3"/>→ <text:s/>自己到自己 = 0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57">空間複雜度 </text:span><text:span text:style-name="T60">O(V²) </text:span><text:span text:style-name="T6">推導</text:span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" loext:marker-style-name="T47"><text:span text:style-name="T47"><text:s text:c="2"/>問：為什麼空間是 </text:span><text:span text:style-name="T61">O(V²)</text:span><text:span text:style-name="T47">？</text:span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</text:span><text:span text:style-name="T90">矩陣大小</text:span><text:span text:style-name="T47"> = </text:span><text:span text:style-name="T101">V 列 × V 行 = V² 個格子</text:span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範例：V=1000 個頂點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4"/>需要 1000 × 1000 = 1,000,000 個格子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即使只有 10 條邊，也要開 100 萬格 → 浪費！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所以：稀疏圖用矩陣很不划算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但稠密圖（邊很多）：每格只要 1 bit → 非常精簡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2" loext:marker-style-name="T47"><text:span text:style-name="T47"><text:s text:c="2"/>1,000,000 bits = 約 122 KB（很小！）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查邊速度 </text:span><text:span text:style-name="T16">O(1) </text:span><text:span text:style-name="T6">推導</text:span>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" loext:marker-style-name="T47"><text:span text:style-name="T47"><text:s text:c="2"/>問：</text:span><text:span text:style-name="T50">A 和 B 之間有沒有邊</text:span><text:span text:style-name="T47">？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107">只要直接查：matrix[A][B]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107">→ 一步就知道答案</text:span><text:span text:style-name="T47">，不需要搜尋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→ </text:span><text:span text:style-name="T70">時間複雜度 O(1)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問：</text:span><text:span text:style-name="T50">計算所有頂點的 Degree</text:span><text:span text:style-name="T47">？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101">計算 A 的 Degree → 掃描第 A 列，數有幾個 1 → 需 O(V)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7"><text:span text:style-name="T47"><text:s text:c="2"/></text:span><text:span text:style-name="T61">全部 V 個頂點都要算 → V × O(V)</text:span><text:span text:style-name="T47"> = O(V²) = O(n²)</text:span></text:p>
          </table:table-cell>
        </table:table-row>
      </table:table>
      <text:h text:style-name="P36" text:outline-level="2" loext:marker-style-name="T12"><text:span text:style-name="T12">2-2 Adjacency List</text:span><text:span text:style-name="T13">（</text:span><text:span text:style-name="T14">相鄰串列</text:span><text:span text:style-name="T13">）</text:span></text:h>
      <text:p text:style-name="P12" loext:marker-style-name="T33"><text:span text:style-name="T83">每個頂點建一條鏈結串列，只記錄「真正存在」的鄰居</text:span><text:span text:style-name="T32">，不存 </text:span><text:span text:style-name="T40">0</text:span><text:span text:style-name="T32">。</text:span></text:p>
      <text:p text:style-name="P1"/>
      <text:p text:style-name="P13" loext:marker-style-name="T7"><text:span text:style-name="T16"><text:s text:c="2"/>▎ </text:span><text:span text:style-name="T6">建構過程圖解（同一張圖）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" loext:marker-style-name="T47"><text:span text:style-name="T47"><text:s text:c="2"/>圖形： <text:s text:c="19"/>轉成串列：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8"/></text:span><text:span text:style-name="T47"/></text:p>
          </table:table-cell>
        </table:table-row>
        <text:soft-page-break/>
        <table:table-row table:style-name="表格7.1">
          <table:table-cell table:style-name="表格7.A1" office:value-type="string">
            <text:p text:style-name="P2" loext:marker-style-name="T47"><text:span text:style-name="T47"><text:s text:c="4"/>A ─── B <text:s text:c="13"/>A <text:s/>→ <text:s/>[B] <text:s/>→ <text:s/>[C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5"/>\ <text:s text:c="2"/>/ <text:s text:c="14"/>B <text:s/>→ <text:s/>[A] <text:s/>→ <text:s/>[C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6"/>\ / <text:s text:c="15"/>C <text:s/>→ <text:s/>[A] <text:s/>→ <text:s/>[B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7"/>C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</text:span><text:span text:style-name="T107">只存「有邊」的部分</text:span><text:span text:style-name="T47">，不存 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</text:span><text:span text:style-name="T91">A-B 這條邊出現兩次</text:span><text:span text:style-name="T47">：在 A 的串列 + 在 B 的串列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7"><text:span text:style-name="T47"><text:s text:c="2"/>（這就是 </text:span><text:span text:style-name="T71">Adjacency List 的缺點：同一條邊存兩份</text:span><text:span text:style-name="T47">）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57">空間複雜度 </text:span><text:span text:style-name="T60">O(V+E) </text:span><text:span text:style-name="T6">推導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" loext:marker-style-name="T47"><text:span text:style-name="T47"><text:s text:c="2"/></text:span><text:span text:style-name="T49">總共需要儲存的資料</text:span><text:span text:style-name="T47">：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① </text:span><text:span text:style-name="T91">V 個頂點的「起始節點」</text:span><text:span text:style-name="T47"> <text:s text:c="6"/>→ </text:span><text:span text:style-name="T61">V 個單元</text:span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② </text:span><text:span text:style-name="T91">每條邊在兩端各存一次</text:span><text:span text:style-name="T104"> </text:span><text:span text:style-name="T47"><text:s text:c="9"/>→ </text:span><text:span text:style-name="T61">2E 個單元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</text:span><text:span text:style-name="T61">總空間 = V + 2E</text:span><text:span text:style-name="T47"> = O(V + E)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2"/>範例比較（V=1000，只有 10 條邊）：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矩陣：1000 × 1000 = 1,000,000 格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串列：1000 + 2×10 <text:s/>= <text:s text:c="5"/>1,020 格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2" loext:marker-style-name="T47"><text:span text:style-name="T47"><text:s text:c="4"/>→ 差了將近 1000 倍！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查邊速度 </text:span><text:span text:style-name="T16">O(degree) </text:span><text:span text:style-name="T6">推導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" loext:marker-style-name="T47"><text:span text:style-name="T47"><text:s text:c="2"/>⚠ 先搞清楚一個初學者最常誤解的地方！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50">A 的鄰接串列</text:span><text:span text:style-name="T47">：</text:span><text:span text:style-name="T107">A <text:s/>→ <text:s/>[B] <text:s/>→ <text:s/>[C] <text:s/>→ <text:s/>[D] <text:s/>→ <text:s/>NULL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50">這裡的箭頭</text:span><text:span text:style-name="T85">「→」是 Linked List 的 next 指標</text:span><text:span text:style-name="T47">，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114">意思是「下一個節點」</text:span><text:span text:style-name="T47">，</text:span><text:span text:style-name="T118">不是圖的邊！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107">正確的解讀方式</text:span><text:span text:style-name="T47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4"/></text:span><text:span text:style-name="T61">A 的鄰居有：B、C、D（A 和這三個頂點各有一條邊）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</text:span><text:span text:style-name="T92">錯誤的解讀方式（千萬別這樣想！）</text:span><text:span text:style-name="T47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4"/></text:span><text:span text:style-name="T115">B 和 C 有邊、C 和 D 有邊 <text:s text:c="2"/>← 完全錯誤！</text:span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正確圖形長這樣：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B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|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7"/>A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6"/>/ \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5"/>C <text:s text:c="2"/>D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2" loext:marker-style-name="T47"><text:span text:style-name="T47"><text:s text:c="2"/>（</text:span><text:span text:style-name="T61">A 分別連到 B、C、D</text:span><text:span text:style-name="T47">，</text:span><text:span text:style-name="T115">B/C/D 彼此之間沒有邊</text:span><text:span text:style-name="T47">）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" loext:marker-style-name="T47"><text:span text:style-name="T47"><text:s text:c="2"/>現在來看：查 A 和 D 之間有沒有邊？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A 的鄰接串列：[B] → [C] → [D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因為串列沒有排序，你不知道 D 藏在哪裡，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只能從頭一個一個往後找：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第 1 步：看 B，不是 D，繼續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第 2 步：看 C，不是 D，繼續</text:span><text:span text:style-name="T47"/></text:p>
          </table:table-cell>
        </table:table-row>
        <text:soft-page-break/>
        <table:table-row table:style-name="表格10.1">
          <table:table-cell table:style-name="表格10.A1" office:value-type="string">
            <text:p text:style-name="P2" loext:marker-style-name="T47"><text:span text:style-name="T47"><text:s text:c="4"/>第 3 步：看 D，找到了！停止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→ 走了 3 步，找到答案：A 和 D 有邊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最壞情況 1：目標在串列最尾端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串列：[B] → [C] → [D] → [E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查 E：B → C → D → E <text:s/>→ 走 4 步才找到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最壞情況 2：目標根本不存在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串列：[B] → [C] → [D] → [E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4"/>查 F：B → C → D → E → NULL <text:s/>→ 走 4 步，走到底才確認沒有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" loext:marker-style-name="T47"><text:span text:style-name="T47"><text:s text:c="2"/>兩種最壞情況，都必須把整條串列從頭走到尾。</text:span><text:span text:style-name="T47"/></text:p>
          </table:table-cell>
        </table:table-row>
      </table:table>
      <text:p text:style-name="P1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" loext:marker-style-name="T47"><text:span text:style-name="T47"><text:s text:c="2"/></text:span><text:span text:style-name="T61">為什麼時間是 O(degree)，而不是 O(V)</text:span><text:span text:style-name="T47">？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/></text:span><text:span text:style-name="T85"><text:s/>degree(A) = A 連出去的邊數 = A 的鄰接串列長度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2"/>範例：圖有 1000 個頂點（V=1000），但 A 只連了 3 個頂點</text:span><text:span text:style-name="T47"/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107">A 的串列：[B] → [C] → [D] → NULL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50">查 A 和 D 是否相鄰：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92">最多只走 3 步 → O(3) = O(degree(A))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</text:span><text:span text:style-name="T50">根本不需要掃描其他 997 個頂點</text:span><text:span text:style-name="T47">！</text:span>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2"/>所以 </text:span><text:span text:style-name="T72">O(degree) 比 O(V) 更精確</text:span><text:span text:style-name="T47">：</text:span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O(degree(A)) ≤ O(V-1) = O(V) <text:s/>（degree 最大是 V-1）</text:span><text:span text:style-name="T47"/></text:p>
          </table:table-cell>
        </table:table-row>
        <table:table-row table:style-name="表格11.1">
          <table:table-cell table:style-name="表格11.A1" office:value-type="string">
            <text:p text:style-name="P2" loext:marker-style-name="T47"><text:span text:style-name="T47"><text:s text:c="4"/>在稀疏圖中 degree &lt;&lt; V，因此通常遠比 O(V) 快</text:span><text:span text:style-name="T47"/></text:p>
          </table:table-cell>
        </table:table-row>
      </table:table>
      <text:h text:style-name="P36" text:outline-level="2" loext:marker-style-name="T12"><text:span text:style-name="T12">2-3 Adjacency Multilist</text:span><text:span text:style-name="T13">（相鄰多重串列）</text:span></text:h>
      <text:p text:style-name="P12" loext:marker-style-name="T33"><text:span text:style-name="T32">先記住這一句話：</text:span><text:span text:style-name="T105">Adjacency Multilist</text:span><text:span text:style-name="T40"> = </text:span><text:span text:style-name="T32">為了讓</text:span><text:span text:style-name="T110">「同一條邊只存一次」</text:span><text:span text:style-name="T34">而發明的資料結構</text:span><text:span text:style-name="T32">。</text:span></text:p>
      <text:p text:style-name="P1"/>
      <text:p text:style-name="P13" loext:marker-style-name="T7"><text:span text:style-name="T16"><text:s text:c="2"/>▎ </text:span><text:span text:style-name="T6">第一步：先看 </text:span><text:span text:style-name="T16">Adjacency List </text:span><text:span text:style-name="T6">的問題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" loext:marker-style-name="T47"><text:span text:style-name="T47"><text:s text:c="2"/>圖形： <text:s text:c="22"/>三條邊：(A,B) <text:s/>(A,C) <text:s/>(B,C)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A ----- B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5"/>\ <text:s text:c="4"/>/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6"/>\ <text:s text:c="2"/>/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8"/>C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用 Adjacency List 存：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A → [B] → [C] → NULL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B → [A] → [C] → NULL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C → [A] → [B] → NULL</text:span><text:span text:style-name="T47"/></text:p>
          </table:table-cell>
        </table:table-row>
        <table:table-row table:style-name="表格12.1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仔細數數看：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A,B) 存了兩份</text:span><text:span text:style-name="T47">：A串列有 B，B串列有 A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A,C) 存了兩份</text:span><text:span text:style-name="T47">：A串列有 C，C串列有 A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4"/></text:span><text:span text:style-name="T51">邊 (B,C) 存了兩份</text:span><text:span text:style-name="T47">：B串列有 C，C串列有 B</text:span>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" loext:marker-style-name="T47"><text:span text:style-name="T47"><text:s text:c="2"/>→ </text:span><text:span text:style-name="T114">3 條邊，卻存了 6 份資料！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二步：為什麼存兩份是問題？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" loext:marker-style-name="T47"><text:span text:style-name="T47"><text:s text:c="2"/></text:span><text:span text:style-name="T70">假設要刪除邊 A-B</text:span><text:span text:style-name="T47">：</text:span></text:p>
          </table:table-cell>
        </table:table-row>
        <text:soft-page-break/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</text:span><text:span text:style-name="T70">你必須同時修改兩個地方</text:span><text:span text:style-name="T47">：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① </text:span><text:span text:style-name="T50">A 的串列中，刪掉 B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② </text:span><text:span text:style-name="T50">B 的串列中，刪掉 A</text:span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如果只改一邊，就會造成資料不一致：</text:span><text:span text:style-name="T47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4"/>A 沒有 B <text:s/>←→ <text:s/>B 卻還有 A <text:s/>→ 資料壞掉！</text:span><text:span text:style-name="T47"/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有人就想：</text:span><text:span text:style-name="T61">能不能讓一條邊只存一份？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這樣</text:span><text:span text:style-name="T90">刪除時只要改一個地方就好</text:span><text:span text:style-name="T47">。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7"><text:span text:style-name="T47"><text:s text:c="2"/>→ 這就是 Adjacency Multilist 的發明動機。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三步：</text:span><text:span text:style-name="T16">Multilist </text:span><text:span text:style-name="T6">的核心想法</text:span>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" loext:marker-style-name="T47"><text:span text:style-name="T47"><text:s text:c="2"/>以前（Adjacency List）：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邊 A-B 存兩份： <text:s/>A → [B] <text:s text:c="2"/>和 <text:s text:c="2"/>B → [A]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2"/>現在（</text:span><text:span text:style-name="T49">Multilist</text:span><text:span text:style-name="T47">）：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</text:span><text:span text:style-name="T108">邊 A-B 只建立一個 Edge 節點 e1</text:span><text:span text:style-name="T47">，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4"/>A 和 B 兩端都直接指向它：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8"/>A ─────┐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15"/>▼</text:span><text:span text:style-name="T47"/></text:p>
          </table:table-cell>
        </table:table-row>
        <table:table-row table:style-name="表格14.10">
          <table:table-cell table:style-name="表格14.A1" office:value-type="string">
            <text:p text:style-name="P2" loext:marker-style-name="T47"><text:span text:style-name="T47"><text:s text:c="15"/></text:span><text:span text:style-name="T52">e1 = (A, B)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15"/>▲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8"/>B ─────┘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7"><text:span text:style-name="T47"><text:s text:c="2"/>→ </text:span><text:span text:style-name="T73">A 和 B 共用同一個 e1</text:span><text:span text:style-name="T47">，不再各自存一份。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四步：三條邊時，建立三個 </text:span><text:span text:style-name="T16">Edge </text:span><text:span text:style-name="T6">節點</text:span>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" loext:marker-style-name="T47"><text:span text:style-name="T47"><text:s text:c="2"/></text:span><text:span text:style-name="T50">圖形有三條邊</text:span><text:span text:style-name="T47"> → </text:span><text:span text:style-name="T120">只建立三個 Edge 節點</text:span><text:span text:style-name="T47">（不是六個！）</text:span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1 = (A, B) <text:s text:c="3"/>e2 = (A, C) <text:s text:c="3"/>e3 = (B, C)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每個節點長這樣（先不管後兩格）：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1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A │ V2=B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2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A │ V2=C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2"/>e3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│ </text:span><text:span text:style-name="T49">V1=B │ V2=C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7"><text:span text:style-name="T47"><text:s text:c="6"/>└──────┴──────┴───┴───┘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五步：</text:span><text:span text:style-name="T57">為什麼需要 </text:span><text:span text:style-name="T60">link1 </text:span><text:span text:style-name="T57">和 </text:span><text:span text:style-name="T60">link2</text:span><text:span text:style-name="T57">？</text:span>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" loext:marker-style-name="T47"><text:span text:style-name="T47"><text:s text:c="2"/>問題：</text:span><text:span text:style-name="T85">每個頂點可能有很多條邊，它怎麼找到自己的所有邊？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以 A 為例：A 有兩條邊，e1=(A,B) 和 e2=(A,C)</text:span><text:span text:style-name="T47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/></text:span><text:span text:style-name="T93"><text:s/>A 需要從 e1 繼續找到 e2</text:span><text:span text:style-name="T47">，</text:span><text:span text:style-name="T50">才能知道自己所有的邊</text:span><text:span text:style-name="T47">。</text:span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以 B 為例：B 也有兩條邊，e1=(A,B) 和 e3=(B,C)</text:span><text:span text:style-name="T47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</text:span><text:span text:style-name="T93">B 需要從 e1 繼續找到 e3</text:span><text:span text:style-name="T47">。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但是 </text:span><text:span text:style-name="T74">A 的下一條是 e2，B 的下一條是 e3，兩個人不一樣！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</text:span><text:span text:style-name="T114">同一個 e1 節點，要同時記錄這兩條不同的路線</text:span><text:span text:style-name="T47">。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2"/>→ 所以 </text:span><text:span text:style-name="T92">e1 裡面需要兩個指標</text:span><text:span text:style-name="T47">：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6"/></text:span><text:span text:style-name="T50">link1：</text:span><text:span text:style-name="T61">給 V1（也就是 A）用</text:span><text:span text:style-name="T47">，</text:span><text:span text:style-name="T50">記錄</text:span><text:span text:style-name="T122">「A 的下一條邊」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7"><text:span text:style-name="T47"><text:s text:c="6"/></text:span><text:span text:style-name="T50">link2：</text:span><text:span text:style-name="T61">給 V2（也就是 B）用</text:span><text:span text:style-name="T47">，</text:span><text:span text:style-name="T50">記錄</text:span><text:span text:style-name="T86">「B 的下一條邊」</text:span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六步：把 </text:span><text:span text:style-name="T16">link1 / link2 </text:span><text:span text:style-name="T6">填入記憶體方塊</text:span>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" loext:marker-style-name="T47"><text:span text:style-name="T47"><text:s text:c="2"/>【站在 A 的角度】 </text:span><text:span text:style-name="T107">A 的邊：e1=(A,B) → e2=(A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</text:span><text:span text:style-name="T85">在 e1 中，A 是 V1，所以用 link1 記下一條：link1 = e2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2 中，A 是 V1，A 沒有下一條邊了： <text:s/>link1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【站在 B 的角度】 </text:span><text:span text:style-name="T107">B 的邊：e1=(A,B) → e3=(B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</text:span><text:span text:style-name="T85">在 e1 中，B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3 中，B 是 V1，B 沒有下一條邊了： <text:s/>link1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【站在 C 的角度】 </text:span><text:span text:style-name="T107">C 的邊：e2=(A,C) → e3=(B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3"/></text:span><text:span text:style-name="T85"><text:s/>在 e2 中，C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4"/>在 e3 中，C 是 V2，C 沒有下一條邊了： <text:s/>link2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填完之後，完整的記憶體方塊如下：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1: ┌──────┬──────┬──────────┬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A │ V2=B │ link1=e2 │ link2=e3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┴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</text:span><text:span text:style-name="T61">A的下一條</text:span><text:span text:style-name="T47"> <text:s/>↑</text:span><text:span text:style-name="T61">B的下一條</text:span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2: ┌──────┬──────┬────────────┬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A │ V2=C │ link1=NULL │ link2=e3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──┴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A已沒有邊 <text:s text:c="2"/>↑C的下一條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"/>e3: ┌──────┬──────┬────────────┬──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│ V1=B │ V2=C │ link1=NULL │ link2=NULL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6"/>└──────┴──────┴────────────┴──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7"><text:span text:style-name="T47"><text:s text:c="22"/>↑B已沒有邊 <text:s text:c="2"/>↑C已沒有邊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第七步：走訪各頂點所有邊（逐步追蹤）</text:span>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" loext:marker-style-name="T47"><text:span text:style-name="T47"><text:s text:c="2"/>頂點起始指標（每個頂點記錄「第一條邊」是誰）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50">A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50">B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</text:span><text:span text:style-name="T49">C 的第一條邊 → e2</text:span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A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A 的起始指標出發 → e1=(A,B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94">A 是 e1 的 V1</text:span><text:span text:style-name="T47">，所以走 link1 → e2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2=(A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6"/></text:span><text:span text:style-name="T94"><text:s/>A 是 e2 的 V1</text:span><text:span text:style-name="T47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2" loext:marker-style-name="T47"><text:span text:style-name="T47"><text:s text:c="4"/>結果：A 的邊 = (A,B) 和 (A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B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B 的起始指標出發 → e1=(A,B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116">B 是 e1 的 V2</text:span><text:span text:style-name="T47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3=(B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116">B 是 e3 的 V1</text:span><text:span text:style-name="T47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結果：B 的邊 = (A,B) 和 (B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走訪 C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① 從 C 的起始指標出發 → e2=(A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92">C 是 e2 的 V2</text:span><text:span text:style-name="T47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② 到達 e3=(B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7"/></text:span><text:span text:style-name="T92">C 是 e3 的 V2</text:span><text:span text:style-name="T47">，所以走 link2 → NULL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③ 遇到 NULL，結束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4"/>結果：C 的邊 = (A,C) 和 (B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關鍵：e1、e2、e3 每個只有一份！A/B/C 各自沿著自己的路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2" loext:marker-style-name="T47"><text:span text:style-name="T47"><text:s text:c="2"/>（link1 或 link2）走，互不干擾，卻共用同一批節點。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考試申論題標準答案：</text:span><text:span text:style-name="T57">為什麼 </text:span><text:span text:style-name="T60">Edge </text:span><text:span text:style-name="T57">節點需要 </text:span><text:span text:style-name="T60">link1 </text:span><text:span text:style-name="T57">和 </text:span><text:span text:style-name="T60">link2</text:span><text:span text:style-name="T6">？</text:span>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" loext:marker-style-name="T47"><text:span text:style-name="T47"><text:s text:c="2"/>因為一條邊同時連接兩個頂點 V1 和 V2。</text:span><text:span text:style-name="T47"/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當</text:span><text:span text:style-name="T53">從 V1 端走訪其所有邊時</text:span><text:span text:style-name="T47">，需要 </text:span><text:span text:style-name="T95">link1</text:span><text:span text:style-name="T48"> 指向 V1 的下一條邊</text:span><text:span text:style-name="T47">；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當</text:span><text:span text:style-name="T53">從 V2 端走訪其所有邊時</text:span><text:span text:style-name="T47">，需要 </text:span><text:span text:style-name="T95">link2</text:span><text:span text:style-name="T48"> 指向 V2 的下一條邊</text:span><text:span text:style-name="T47">。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</text:span><text:span text:style-name="T50">兩端的「下一條邊」</text:span><text:span text:style-name="T47">通常是</text:span><text:span text:style-name="T85">不同的邊節點</text:span><text:span text:style-name="T47">，</text:span></text:p>
          </table:table-cell>
        </table:table-row>
        <table:table-row table:style-name="表格19.1">
          <table:table-cell table:style-name="表格19.A1" office:value-type="string">
            <text:p text:style-name="P2" loext:marker-style-name="T47"><text:span text:style-name="T47"><text:s text:c="2"/>因此 </text:span><text:span text:style-name="T71">Edge 節點必須同時保存 link1 與 link2 兩個鏈結指標</text:span><text:span text:style-name="T47">。</text:span></text:p>
          </table:table-cell>
        </table:table-row>
      </table:table>
      <text:p text:style-name="P1"/>
      <text:p text:style-name="P13" loext:marker-style-name="T7"><text:span text:style-name="T16"><text:s text:c="2"/>▎ Degree </text:span><text:span text:style-name="T6">計算時間比較</text:span>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61">計算「所有頂點的 Degree」</text:span><text:span text:style-name="T47">：</text:span></text:p>
          </table:table-cell>
        </table:table-row>
        <table:table-row table:style-name="表格20.2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107">Matrix 做法</text:span><text:span text:style-name="T47">：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93">掃描整張 n×n 矩陣 → 看每個格子是不是 0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需要看 n² 個格子 → </text:span><text:span text:style-name="T85">O(n²)</text:span>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</text:span><text:span text:style-name="T107">Multilist 做法</text:span><text:span text:style-name="T47">：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93">走訪 n 個頂點的起始指標 <text:s text:c="4"/>→ n 步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</text:span><text:span text:style-name="T48">檢查所有 e 條邊</text:span><text:span text:style-name="T90">（每條邊會從兩端各被看到一次）</text:span><text:span text:style-name="T92">→ 2e 步</text:span></text:p>
          </table:table-cell>
        </table:table-row>
        <table:table-row table:style-name="表格20.1">
          <table:table-cell table:style-name="表格20.A10" office:value-type="string">
            <text:p text:style-name="P2" loext:marker-style-name="T47"><text:span text:style-name="T47"><text:s text:c="4"/></text:span><text:span text:style-name="T129">走訪所有頂點需 O(n)；每條邊在 V1 端與 V2 端各被走訪一次，共 O(2e)。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總計 </text:span><text:span text:style-name="T85">n + 2e = O(n+e)</text:span>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2"/>範例（n=10000，e=20）：</text:span><text:span text:style-name="T47"/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Matrix <text:s text:c="2"/>→ 100,000,000 步</text:span><text:span text:style-name="T47"/></text:p>
          </table:table-cell>
        </table:table-row>
        <table:table-row table:style-name="表格20.1">
          <table:table-cell table:style-name="表格20.A1" office:value-type="string">
            <text:p text:style-name="P2" loext:marker-style-name="T47"><text:span text:style-name="T47"><text:s text:c="4"/>Multilist → <text:s text:c="5"/>10,040 步 <text:s/>（快 10000 倍！）</text:span><text:span text:style-name="T47"/></text:p>
          </table:table-cell>
        </table:table-row>
      </table:table>
      <text:h text:style-name="P36" text:outline-level="2" loext:marker-style-name="T12"><text:span text:style-name="T12">2-4 </text:span><text:span text:style-name="T13">三種表示法比較總表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row table:style-name="表格21.1">
          <table:table-cell table:style-name="表格21.A1" office:value-type="string">
            <text:p text:style-name="P3" loext:marker-style-name="T131"><text:span text:style-name="T130">比較項目</text:span><text:span text:style-name="T131"/></text:p>
          </table:table-cell>
          <table:table-cell table:style-name="表格21.A1" office:value-type="string">
            <text:p text:style-name="P10" loext:marker-style-name="T131"><text:span text:style-name="T134">Adjacency Matrix</text:span><text:span text:style-name="T131"/></text:p>
          </table:table-cell>
          <table:table-cell table:style-name="表格21.A1" office:value-type="string">
            <text:p text:style-name="P10" loext:marker-style-name="T131"><text:span text:style-name="T134">Adjacency List</text:span><text:span text:style-name="T131"/></text:p>
          </table:table-cell>
          <table:table-cell table:style-name="表格21.A1" office:value-type="string">
            <text:p text:style-name="P10" loext:marker-style-name="T131"><text:span text:style-name="T134">Adjacency Multilist</text:span><text:span text:style-name="T131"/></text:p>
          </table:table-cell>
          <table:table-cell table:style-name="表格21.A1" office:value-type="string">
            <text:p text:style-name="P3" loext:marker-style-name="T131"><text:span text:style-name="T130">備註</text:span><text:span text:style-name="T131"/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空間複雜度</text:span><text:span text:style-name="T36"/></text:p>
          </table:table-cell>
          <table:table-cell table:style-name="表格21.B2" office:value-type="string">
            <text:p text:style-name="P10" loext:marker-style-name="T136"><text:span text:style-name="T135">O(V²)</text:span><text:span text:style-name="T136"/></text:p>
          </table:table-cell>
          <table:table-cell table:style-name="表格21.C2" office:value-type="string">
            <text:p text:style-name="P10" loext:marker-style-name="T142"><text:span text:style-name="T140">O(V+E)</text:span><text:span text:style-name="T142"/></text:p>
          </table:table-cell>
          <table:table-cell table:style-name="表格21.C2" office:value-type="string">
            <text:p text:style-name="P10" loext:marker-style-name="T142"><text:span text:style-name="T140">O(V+E)</text:span><text:span text:style-name="T142"/></text:p>
          </table:table-cell>
          <table:table-cell table:style-name="表格21.E2" office:value-type="string">
            <text:p text:style-name="P3" loext:marker-style-name="T33"><text:span text:style-name="T32">稀疏圖用 </text:span><text:span text:style-name="T40">List/Multilist</text:span></text:p>
          </table:table-cell>
        </table:table-row>
        <table:table-row table:style-name="表格21.1">
          <table:table-cell table:style-name="表格21.E2" office:value-type="string">
            <text:p text:style-name="P3" loext:marker-style-name="T36"><text:span text:style-name="T35">查邊速度</text:span><text:span text:style-name="T36"/></text:p>
          </table:table-cell>
          <table:table-cell table:style-name="表格21.C2" office:value-type="string">
            <text:p text:style-name="P10" loext:marker-style-name="T142"><text:span text:style-name="T140">O(1)</text:span><text:span text:style-name="T142"/></text:p>
          </table:table-cell>
          <table:table-cell table:style-name="表格21.B2" office:value-type="string">
            <text:p text:style-name="P10" loext:marker-style-name="T136"><text:span text:style-name="T135">O(degree)</text:span><text:span text:style-name="T136"/></text:p>
          </table:table-cell>
          <table:table-cell table:style-name="表格21.B2" office:value-type="string">
            <text:p text:style-name="P10" loext:marker-style-name="T136"><text:span text:style-name="T135">O(degree)</text:span><text:span text:style-name="T136"/></text:p>
          </table:table-cell>
          <table:table-cell table:style-name="表格21.E2" office:value-type="string">
            <text:p text:style-name="P3" loext:marker-style-name="T33"><text:span text:style-name="T32">查詢快 → 選矩陣</text:span><text:span text:style-name="T33"/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計算全部 </text:span><text:span text:style-name="T41">Degree</text:span></text:p>
          </table:table-cell>
          <table:table-cell table:style-name="表格21.B2" office:value-type="string">
            <text:p text:style-name="P10" loext:marker-style-name="T136"><text:span text:style-name="T135">O(n²)</text:span><text:span text:style-name="T136"/></text:p>
          </table:table-cell>
          <table:table-cell table:style-name="表格21.C2" office:value-type="string">
            <text:p text:style-name="P10" loext:marker-style-name="T142"><text:span text:style-name="T140">O(n+e)</text:span><text:span text:style-name="T142"/></text:p>
          </table:table-cell>
          <table:table-cell table:style-name="表格21.C2" office:value-type="string">
            <text:p text:style-name="P10" loext:marker-style-name="T142"><text:span text:style-name="T140">O(n+e)</text:span><text:span text:style-name="T142"/></text:p>
          </table:table-cell>
          <table:table-cell table:style-name="表格21.A2" office:value-type="string">
            <text:p text:style-name="P3" loext:marker-style-name="T33"><text:span text:style-name="T40">Multilist </text:span><text:span text:style-name="T32">不掃空格</text:span></text:p>
          </table:table-cell>
        </table:table-row>
        <text:soft-page-break/>
        <table:table-row table:style-name="表格21.1">
          <table:table-cell table:style-name="表格21.E2" office:value-type="string">
            <text:p text:style-name="P3" loext:marker-style-name="T36"><text:span text:style-name="T35">邊的儲存次數</text:span><text:span text:style-name="T36"/></text:p>
          </table:table-cell>
          <table:table-cell table:style-name="表格21.E2" office:value-type="string">
            <text:p text:style-name="P10" loext:marker-style-name="T33"><text:span text:style-name="T40">1</text:span><text:span text:style-name="T32">次</text:span><text:span text:style-name="T40">/</text:span><text:span text:style-name="T32">格</text:span></text:p>
          </table:table-cell>
          <table:table-cell table:style-name="表格21.B2" office:value-type="string">
            <text:p text:style-name="P10" loext:marker-style-name="T138"><text:span text:style-name="T137">存兩次（無向）</text:span><text:span text:style-name="T138"/></text:p>
          </table:table-cell>
          <table:table-cell table:style-name="表格21.C2" office:value-type="string">
            <text:p text:style-name="P10" loext:marker-style-name="T56"><text:span text:style-name="T55">只存一次 ✓</text:span><text:span text:style-name="T56"/></text:p>
          </table:table-cell>
          <table:table-cell table:style-name="表格21.E2" office:value-type="string">
            <text:p text:style-name="P3" loext:marker-style-name="T33"><text:span text:style-name="T40">Multilist </text:span><text:span text:style-name="T32">最省</text:span></text:p>
          </table:table-cell>
        </table:table-row>
        <table:table-row table:style-name="表格21.1">
          <table:table-cell table:style-name="表格21.A2" office:value-type="string">
            <text:p text:style-name="P3" loext:marker-style-name="T36"><text:span text:style-name="T35">適合圖形</text:span><text:span text:style-name="T36"/></text:p>
          </table:table-cell>
          <table:table-cell table:style-name="表格21.B6" office:value-type="string">
            <text:p text:style-name="P10" loext:marker-style-name="T11"><text:span text:style-name="T18">Dense</text:span><text:span text:style-name="T10">（稠密）</text:span></text:p>
          </table:table-cell>
          <table:table-cell table:style-name="表格21.C6" office:value-type="string">
            <text:p text:style-name="P10" loext:marker-style-name="T22"><text:span text:style-name="T27">Sparse</text:span><text:span text:style-name="T21">（稀疏）</text:span></text:p>
          </table:table-cell>
          <table:table-cell table:style-name="表格21.C6" office:value-type="string">
            <text:p text:style-name="P10" loext:marker-style-name="T22"><text:span text:style-name="T27">Sparse</text:span><text:span text:style-name="T21">（稀疏）</text:span></text:p>
          </table:table-cell>
          <table:table-cell table:style-name="表格21.A2" office:value-type="string">
            <text:p text:style-name="P3"/>
          </table:table-cell>
        </table:table-row>
      </table:table>
      <text:p text:style-name="Standard"/>
      <text:h text:style-name="P34" text:outline-level="1" loext:marker-style-name="T4"><text:span text:style-name="T3">三、</text:span><text:span text:style-name="T4">BFS</text:span><text:span text:style-name="T3">（</text:span><text:span text:style-name="T5">廣度優先</text:span><text:span text:style-name="T3">搜尋）─ 含完整圖解</text:span></text:h>
      <text:p text:style-name="P12" loext:marker-style-name="T33"><text:span text:style-name="T42">Breadth-First</text:span><text:span text:style-name="T40"> Search</text:span><text:span text:style-name="T32">｜使用 </text:span><text:span text:style-name="T40">Queue</text:span><text:span text:style-name="T32">（</text:span><text:span text:style-name="T40">FIFO </text:span><text:span text:style-name="T32">佇列）</text:span></text:p>
      <text:p text:style-name="P1"/>
      <text:h text:style-name="P36" text:outline-level="2" loext:marker-style-name="T12"><text:span text:style-name="T12">3-1 </text:span><text:span text:style-name="T13">核心概念圖解</text:span></text:h>
      <text:p text:style-name="P13" loext:marker-style-name="T7"><text:span text:style-name="T16"><text:s text:c="2"/>▎ </text:span><text:span text:style-name="T6">為什麼叫「廣度」優先？</text:span>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" loext:marker-style-name="T47"><text:span text:style-name="T47"><text:s text:c="2"/>圖形（樹狀）：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9"/>A <text:s text:c="9"/>← 第 0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7"/>/ <text:s text:c="2"/>\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5"/>B <text:s text:c="6"/>C <text:s text:c="5"/>← 第 1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4"/>/ \ <text:s text:c="4"/>/ \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13"/>D <text:s text:c="2"/>E <text:s text:c="2"/>F <text:s text:c="2"/>G <text:s text:c="3"/>← 第 2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BFS 從 A 出發，一層一層往外走：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0 層：拜訪 A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1 層：拜訪 B、C（A 的鄰居全部先拜訪完）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第 2 層：拜訪 D、E、F、G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輸出順序：A → B → C → D → E → F → G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7"><text:span text:style-name="T47"><text:s text:c="2"/>比喻：水面漣漪，從中心一圈一圈向外擴散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3-2 BFS </text:span><text:span text:style-name="T13">逐步追蹤（詳細步驟）</text:span></text:h>
      <text:p text:style-name="P13" loext:marker-style-name="T7"><text:span text:style-name="T16"><text:s text:c="2"/>▎ </text:span><text:span text:style-name="T6">使用的圖形：</text:span>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" loext:marker-style-name="T47"><text:span text:style-name="T47"><text:s text:c="6"/>A ── B ── D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6"/>| <text:s text:c="8"/>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6"/>C ── E <text:s text:c="2"/>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/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2"/>邊：A-B <text:s/>A-C <text:s/>B-D <text:s/>C-E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2" loext:marker-style-name="T47"><text:span text:style-name="T47"><text:s text:c="2"/>從 A 開始 BFS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每一步驟狀態追蹤：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 table:number-columns-repeated="2"/>
        <table:table-row table:style-name="表格24.1">
          <table:table-cell table:style-name="表格24.A1" office:value-type="string">
            <text:p text:style-name="P10" loext:marker-style-name="T131"><text:span text:style-name="T130">步</text:span><text:span text:style-name="T131"/></text:p>
          </table:table-cell>
          <table:table-cell table:style-name="表格24.A1" office:value-type="string">
            <text:p text:style-name="P3" loext:marker-style-name="T131"><text:span text:style-name="T130">動作</text:span><text:span text:style-name="T131"/></text:p>
          </table:table-cell>
          <table:table-cell table:style-name="表格24.A1" office:value-type="string">
            <text:p text:style-name="P10" loext:marker-style-name="T131"><text:span text:style-name="T134">Queue </text:span><text:span text:style-name="T130">狀態（左</text:span><text:span text:style-name="T134">=</text:span><text:span text:style-name="T130">隊首）</text:span></text:p>
          </table:table-cell>
          <table:table-cell table:style-name="表格24.A1" office:value-type="string">
            <text:p text:style-name="P10" loext:marker-style-name="T131"><text:span text:style-name="T130">已拜訪</text:span><text:span text:style-name="T131"/></text:p>
          </table:table-cell>
          <table:table-cell table:style-name="表格24.A1" office:value-type="string">
            <text:p text:style-name="P10" loext:marker-style-name="T131"><text:span text:style-name="T130">輸出</text:span><text:span text:style-name="T131"/></text:p>
          </table:table-cell>
        </table:table-row>
        <table:table-row table:style-name="表格24.1">
          <table:table-cell table:style-name="表格24.A2" office:value-type="string">
            <text:p text:style-name="P10" loext:marker-style-name="T24"><text:span text:style-name="T23">初始</text:span><text:span text:style-name="T24"/></text:p>
          </table:table-cell>
          <table:table-cell table:style-name="表格24.A2" office:value-type="string">
            <text:p text:style-name="P3" loext:marker-style-name="T33"><text:span text:style-name="T40">push </text:span><text:span text:style-name="T32">起點 </text:span><text:span text:style-name="T40">A</text:span><text:span text:style-name="T32">，加入已拜訪</text:span></text:p>
          </table:table-cell>
          <table:table-cell table:style-name="表格24.A2" office:value-type="string">
            <text:p text:style-name="P10" loext:marker-style-name="T43"><text:span text:style-name="T43">[ A ]</text:span><text:span text:style-name="T43"/></text:p>
          </table:table-cell>
          <table:table-cell table:style-name="表格24.A2" office:value-type="string">
            <text:p text:style-name="P10" loext:marker-style-name="T33"><text:span text:style-name="T40">{A}</text:span><text:span text:style-name="T33"/></text:p>
          </table:table-cell>
          <table:table-cell table:style-name="表格24.A2" office:value-type="string">
            <text:p text:style-name="P10" loext:marker-style-name="T33"><text:span text:style-name="T32">（空）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10" loext:marker-style-name="T24"><text:span text:style-name="T28">①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A → </text:span><text:span text:style-name="T32">輸出 </text:span><text:span text:style-name="T40">A </text:span><text:span text:style-name="T32">將鄰居 </text:span><text:span text:style-name="T40">B</text:span><text:span text:style-name="T32">、</text:span><text:span text:style-name="T40">C </text:span><text:span text:style-name="T32">加入</text:span></text:p>
          </table:table-cell>
          <table:table-cell table:style-name="表格24.A3" office:value-type="string">
            <text:p text:style-name="P10" loext:marker-style-name="T43"><text:span text:style-name="T43">[ B, C ]</text:span><text:span text:style-name="T43"/></text:p>
          </table:table-cell>
          <table:table-cell table:style-name="表格24.A3" office:value-type="string">
            <text:p text:style-name="P10" loext:marker-style-name="T33"><text:span text:style-name="T40">{A,B,C}</text:span><text:span text:style-name="T33"/></text:p>
          </table:table-cell>
          <table:table-cell table:style-name="表格24.A3" office:value-type="string">
            <text:p text:style-name="P10" loext:marker-style-name="T33"><text:span text:style-name="T40">A</text:span><text:span text:style-name="T33"/></text:p>
          </table:table-cell>
        </table:table-row>
        <table:table-row table:style-name="表格24.1">
          <table:table-cell table:style-name="表格24.A2" office:value-type="string">
            <text:p text:style-name="P10" loext:marker-style-name="T24"><text:span text:style-name="T28">②</text:span><text:span text:style-name="T24"/></text:p>
          </table:table-cell>
          <table:table-cell table:style-name="表格24.A2" office:value-type="string">
            <text:p text:style-name="P3" loext:marker-style-name="T33"><text:span text:style-name="T40">dequeue B → </text:span><text:span text:style-name="T32">輸出 </text:span><text:span text:style-name="T40">B </text:span><text:span text:style-name="T32">將鄰居 </text:span><text:span text:style-name="T40">D </text:span><text:span text:style-name="T32">加入（</text:span><text:span text:style-name="T40">A </text:span><text:span text:style-name="T32">已拜訪跳過）</text:span></text:p>
          </table:table-cell>
          <table:table-cell table:style-name="表格24.A2" office:value-type="string">
            <text:p text:style-name="P10" loext:marker-style-name="T43"><text:span text:style-name="T43">[ C, D ]</text:span><text:span text:style-name="T43"/></text:p>
          </table:table-cell>
          <table:table-cell table:style-name="表格24.A2" office:value-type="string">
            <text:p text:style-name="P10" loext:marker-style-name="T33"><text:span text:style-name="T40">{A,B,C,D}</text:span><text:span text:style-name="T33"/></text:p>
          </table:table-cell>
          <table:table-cell table:style-name="表格24.A2" office:value-type="string">
            <text:p text:style-name="P10" loext:marker-style-name="T33"><text:span text:style-name="T40">A B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10" loext:marker-style-name="T24"><text:span text:style-name="T28">③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C → </text:span><text:span text:style-name="T32">輸出 </text:span><text:span text:style-name="T40">C </text:span><text:span text:style-name="T32">將鄰居 </text:span><text:span text:style-name="T40">E </text:span><text:span text:style-name="T32">加入（</text:span><text:span text:style-name="T40">A </text:span><text:span text:style-name="T32">已拜訪跳過）</text:span></text:p>
          </table:table-cell>
          <table:table-cell table:style-name="表格24.A3" office:value-type="string">
            <text:p text:style-name="P10" loext:marker-style-name="T43"><text:span text:style-name="T43">[ D, E ]</text:span><text:span text:style-name="T43"/></text:p>
          </table:table-cell>
          <table:table-cell table:style-name="表格24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24.A3" office:value-type="string">
            <text:p text:style-name="P10" loext:marker-style-name="T33"><text:span text:style-name="T40">A B C</text:span><text:span text:style-name="T33"/></text:p>
          </table:table-cell>
        </table:table-row>
        <table:table-row table:style-name="表格24.1">
          <table:table-cell table:style-name="表格24.A2" office:value-type="string">
            <text:p text:style-name="P10" loext:marker-style-name="T24"><text:span text:style-name="T28">④</text:span><text:span text:style-name="T24"/></text:p>
          </table:table-cell>
          <table:table-cell table:style-name="表格24.A2" office:value-type="string">
            <text:p text:style-name="P3" loext:marker-style-name="T33"><text:span text:style-name="T40">dequeue D → </text:span><text:span text:style-name="T32">輸出 </text:span><text:span text:style-name="T40">D </text:span><text:span text:style-name="T32">無未拜訪鄰居</text:span></text:p>
          </table:table-cell>
          <table:table-cell table:style-name="表格24.A2" office:value-type="string">
            <text:p text:style-name="P10" loext:marker-style-name="T43"><text:span text:style-name="T43">[ E ]</text:span><text:span text:style-name="T43"/></text:p>
          </table:table-cell>
          <table:table-cell table:style-name="表格24.A2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24.A2" office:value-type="string">
            <text:p text:style-name="P10" loext:marker-style-name="T33"><text:span text:style-name="T40">A B C D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10" loext:marker-style-name="T24"><text:span text:style-name="T28">⑤</text:span><text:span text:style-name="T24"/></text:p>
          </table:table-cell>
          <table:table-cell table:style-name="表格24.A3" office:value-type="string">
            <text:p text:style-name="P3" loext:marker-style-name="T33"><text:span text:style-name="T40">dequeue E → </text:span><text:span text:style-name="T32">輸出 </text:span><text:span text:style-name="T40">E </text:span><text:span text:style-name="T32">無未拜訪鄰居</text:span></text:p>
          </table:table-cell>
          <table:table-cell table:style-name="表格24.A3" office:value-type="string">
            <text:p text:style-name="P10" loext:marker-style-name="T43"><text:span text:style-name="T43">[ ]（空）</text:span><text:span text:style-name="T43"/></text:p>
          </table:table-cell>
          <table:table-cell table:style-name="表格24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24.A3" office:value-type="string">
            <text:p text:style-name="P10" loext:marker-style-name="T142"><text:span text:style-name="T140">A B C D E</text:span><text:span text:style-name="T142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為什麼 </text:span><text:span text:style-name="T16">Queue </text:span><text:span text:style-name="T6">能保證「層次」順序？</text:span></text:p>
      <table:table table:name="表格25" table:style-name="表格25">
        <table:table-column table:style-name="表格25.A"/>
        <text:soft-page-break/>
        <table:table-row table:style-name="表格25.1">
          <table:table-cell table:style-name="表格25.A1" office:value-type="string">
            <text:p text:style-name="P2" loext:marker-style-name="T47"><text:span text:style-name="T47"><text:s text:c="2"/>FIFO（先進先出）的特性：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第 1 層的 B、C 先進 Queue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第 2 層的 D、E 後進 Queue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Queue: [ B, C, D, E ]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11"/>↑ <text:s text:c="10"/>← dequeue 從這端取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9"/>B 先出 → C 先出 → D 先出 → E 先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B、C（第 1 層）一定比 D、E（第 2 層）先被取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7"><text:span text:style-name="T47"><text:s text:c="2"/>→ 保證層次順序！這就是「廣度優先」的核心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3-3 BFS </text:span><text:span text:style-name="T13">時間與空間複雜度推導</text:span></text:h>
      <text:p text:style-name="P13" loext:marker-style-name="T7"><text:span text:style-name="T16"><text:s text:c="2"/>▎ </text:span><text:span text:style-name="T6">時間複雜度：</text:span><text:span text:style-name="T60">O(V + E)</text:span></text:p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103">每個頂點最多被 enqueue / dequeue 一次</text:span><text:span text:style-name="T47"> <text:s/>→ </text:span><text:span text:style-name="T123">O(V)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85">每條邊在處理時最多被檢查兩次（兩端各一）</text:span><text:span text:style-name="T47">→ </text:span><text:span text:style-name="T124">O(E)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總計：</text:span><text:span text:style-name="T61">O(V) + O(E) = O(V + E)</text:span></text:p>
          </table:table-cell>
        </table:table-row>
        <table:table-row table:style-name="表格26.1">
          <table:table-cell table:style-name="表格26.A1" office:value-type="string">
            <text:p text:style-name="P2"/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範例：</text:span><text:span text:style-name="T50">V=5，E=4</text:span></text:p>
          </table:table-cell>
        </table:table-row>
        <table:table-row table:style-name="表格26.1">
          <table:table-cell table:style-name="表格26.A1" office:value-type="string">
            <text:p text:style-name="P2" loext:marker-style-name="T47"><text:span text:style-name="T47"><text:s text:c="2"/></text:span><text:span text:style-name="T92">時間複雜度與 V+E 成正比</text:span><text:span text:style-name="T47">，此圖規模為 O(5+4) = O(9) （非常有效率）</text:span></text:p>
          </table:table-cell>
        </table:table-row>
      </table:table>
      <text:p text:style-name="P13" loext:marker-style-name="T7"><text:span text:style-name="T16"><text:s text:c="2"/>▎ </text:span><text:span text:style-name="T6">空間複雜度：</text:span><text:span text:style-name="T60">O(V)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text:span text:style-name="T72">Queue 最多同時放幾個頂點？</text:span></text:p>
          </table:table-cell>
        </table:table-row>
        <table:table-row table:style-name="表格27.1">
          <table:table-cell table:style-name="表格27.A1" office:value-type="string">
            <text:p text:style-name="P2"/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text:span text:style-name="T103">最壞情況下</text:span><text:span text:style-name="T47">，</text:span><text:span text:style-name="T71">Queue 中可能同時存放 Θ(V) 個頂點</text:span></text:p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（例如</text:span><text:span text:style-name="T50">星形圖中</text:span><text:span text:style-name="T47">，</text:span><text:span text:style-name="T85">處理中心頂點後，其餘 V−1 個頂點同時進入 Queue</text:span><text:span text:style-name="T47">）</text:span></text:p>
          </table:table-cell>
        </table:table-row>
        <table:table-row table:style-name="表格27.1">
          <table:table-cell table:style-name="表格27.A1" office:value-type="string">
            <text:p text:style-name="P4"/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因此 </text:span><text:span text:style-name="T50">Queue 所需空間為</text:span><text:span text:style-name="T47"> </text:span><text:span text:style-name="T123">O(V)</text:span><text:span text:style-name="T47">。</text:span></text:p>
          </table:table-cell>
        </table:table-row>
        <table:table-row table:style-name="表格27.1">
          <table:table-cell table:style-name="表格27.A1" office:value-type="string">
            <text:p text:style-name="P2" loext:marker-style-name="T47"><text:span text:style-name="T47"><text:s text:c="2"/></text:span></text:p>
          </table:table-cell>
        </table:table-row>
        <table:table-row table:style-name="表格27.1">
          <table:table-cell table:style-name="表格27.A8" office:value-type="string">
            <text:p text:style-name="P16" loext:marker-style-name="T47"><text:s text:c="2"/>另需 <text:span text:style-name="T151">visited 陣列記錄已拜訪頂點</text:span> → <text:span text:style-name="T75">O(V)</text:span></text:p>
          </table:table-cell>
        </table:table-row>
        <table:table-row table:style-name="表格27.1">
          <table:table-cell table:style-name="表格27.A8" office:value-type="string">
            <text:p text:style-name="P16" loext:marker-style-name="T47"/>
          </table:table-cell>
        </table:table-row>
        <table:table-row table:style-name="表格27.1">
          <table:table-cell table:style-name="表格27.A8" office:value-type="string">
            <text:p text:style-name="P16" loext:marker-style-name="T47"><text:s text:c="2"/><text:span text:style-name="T97">總空間複雜度：</text:span></text:p>
          </table:table-cell>
        </table:table-row>
        <table:table-row table:style-name="表格27.1">
          <table:table-cell table:style-name="表格27.A8" office:value-type="string">
            <text:p text:style-name="P16" loext:marker-style-name="T47"><text:s text:c="2"/><text:span text:style-name="T97">O(V)+O(V)=O(V)</text:span></text:p>
          </table:table-cell>
        </table:table-row>
      </table:table>
      <text:p text:style-name="P17" loext:marker-style-name="T145"><text:span text:style-name="T145"><text:s text:c="2"/>▎ ⚠ 重要前提：</text:span><text:span text:style-name="T58">O(V+E) 成立的條件</text:span>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8" loext:marker-style-name="T147"><text:span text:style-name="T146"><text:s text:c="2"/>上述 </text:span><text:span text:style-name="T94">BFS / DFS 的 O(V+E)是建立在 Graph 採用 Adjacency List或 Adjacency Multilist 儲存的情況下</text:span><text:span text:style-name="T146">。</text:span></text:p>
            <text:p text:style-name="P18" loext:marker-style-name="T147"><text:span text:style-name="T146"><text:s text:c="2"/>若 Graph 採用 Adjacency Matrix，</text:span><text:span text:style-name="T85">若使用 Adjacency Matrix</text:span><text:span text:style-name="T147">，每處理一個頂點需掃描整列（O(V)）找鄰居，共 V 個頂點 × O(V) = O(V²)，</text:span><text:span text:style-name="T85">時間複雜度為 O(V²)，而非 O(V+E)</text:span><text:span text:style-name="T147">。</text:span></text:p>
            <text:p text:style-name="P19" loext:marker-style-name="T146"><text:span text:style-name="T146"/></text:p>
            <text:p text:style-name="P19" loext:marker-style-name="T146"><text:span text:style-name="T146">【一句話結論】</text:span></text:p>
            <text:p text:style-name="P19" loext:marker-style-name="T146"><text:span text:style-name="T102">BFS 的 O(V+E) 成立，是因為 Graph 採用 Adjacency List</text:span><text:span text:style-name="T146">（或 Adjacency Multilist）</text:span><text:span text:style-name="T102">儲存</text:span><text:span text:style-name="T146">的前下，</text:span><text:span text:style-name="T109">BFS 的執行過程幾乎等同於「依序</text:span><text:span text:style-name="T96">掃描每個頂點的 Adjacency List 一遍</text:span><text:span text:style-name="T109">」</text:span><text:span text:style-name="T146">。</text:span></text:p>
          </table:table-cell>
        </table:table-row>
      </table:table>
      <text:p text:style-name="Standard"/>
      <text:p text:style-name="P5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20">▎ 為什麼這樣說？BFS 與 Adjacency List 的深層關係</text:p>
          </table:table-cell>
        </table:table-row>
        <table:table-row table:style-name="表格54.1">
          <table:table-cell table:style-name="表格54.A2" office:value-type="string">
            <text:p text:style-name="P28"><text:span text:style-name="T161">BFS</text:span> 是<text:span text:style-name="T106">「演算法」（圖怎麼走）</text:span></text:p>
            <text:p text:style-name="P29"><text:span text:style-name="T163">Adjacency List</text:span> 是<text:span text:style-name="T89">「儲存方式」（圖怎麼存）</text:span></text:p>
            <text:p text:style-name="P21">兩者概念不同，但在實作上緊密結合。</text:p>
            <text:p text:style-name="P6"/>
            <text:p text:style-name="P21">BFS 虛擬碼：</text:p>
            <text:p text:style-name="P6"/>
            <text:p text:style-name="P21"><text:s text:c="2"/>while (<text:span text:style-name="T165">!Q.empty()</text:span>) {</text:p>
            <text:p text:style-name="P21"><text:s text:c="5"/><text:span text:style-name="T165"><text:s/>u = Q.front()</text:span>;</text:p>
            <text:p text:style-name="P6"><text:soft-page-break/><text:span text:style-name="T156"><text:s text:c="5"/></text:span><text:span text:style-name="T158"><text:s/>Q.pop()</text:span><text:span text:style-name="T156">;</text:span></text:p>
            <text:p text:style-name="P21"><text:s text:c="6"/>for (<text:span text:style-name="T152">each neighbor v of u</text:span>) { <text:s text:c="2"/>← 這一行！</text:p>
            <text:p text:style-name="P21"><text:s text:c="10"/>if (<text:span text:style-name="T153">!visited[v]</text:span>) {</text:p>
            <text:p text:style-name="P21"><text:s text:c="14"/>visited[v] = true;</text:p>
            <text:p text:style-name="P21"><text:s text:c="14"/><text:span text:style-name="T155">Q.push(v);</text:span></text:p>
            <text:p text:style-name="P21"><text:s text:c="10"/>}</text:p>
            <text:p text:style-name="P21"><text:s text:c="6"/>}</text:p>
            <text:p text:style-name="P21"><text:s text:c="2"/>}</text:p>
            <text:p text:style-name="P6"/>
            <text:p text:style-name="P21"><text:span text:style-name="T154">「for (each neighbor v of u)」實際上就是</text:span>：</text:p>
            <text:p text:style-name="P21">→ <text:span text:style-name="T64">掃描 u 的 Adjacency List 中每一個鄰居節點</text:span></text:p>
            <text:p text:style-name="P6"/>
            <text:p text:style-name="P21">因此，<text:span text:style-name="T113">BFS 的整體執行過程</text:span> =</text:p>
            <text:p text:style-name="P31">Queue（管理拜訪順序）+ 不停掃描各頂點的 Adjacency List</text:p>
          </table:table-cell>
        </table:table-row>
      </table:table>
      <text:p text:style-name="P5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20">▎ 用<text:span text:style-name="T165">同一張圖</text:span>，<text:span text:style-name="T63">並排比較 Adjacency List 與 BFS 的走法</text:span></text:p>
          </table:table-cell>
        </table:table-row>
        <table:table-row table:style-name="表格55.1">
          <table:table-cell table:style-name="表格55.A2" office:value-type="string">
            <text:p text:style-name="P21">圖形：</text:p>
            <text:p text:style-name="P21"><text:s text:c="8"/>A</text:p>
            <text:p text:style-name="P21"><text:s text:c="7"/>/ \</text:p>
            <text:p text:style-name="P21"><text:s text:c="6"/>B <text:s text:c="2"/>C</text:p>
            <text:p text:style-name="P21"><text:s text:c="5"/>/ \</text:p>
            <text:p text:style-name="P21"><text:s text:c="4"/>D <text:s text:c="2"/>E</text:p>
            <text:p text:style-name="P6"/>
            <text:p text:style-name="P29">【Adjacency List 的樣子（資料）】</text:p>
            <text:p text:style-name="P21">A : B → C → NULL</text:p>
            <text:p text:style-name="P21">B : A → D → E → NULL</text:p>
            <text:p text:style-name="P21">C : A → NULL</text:p>
            <text:p text:style-name="P21">D : B → NULL</text:p>
            <text:p text:style-name="P21">E : B → NULL</text:p>
            <text:p text:style-name="P30"/>
            <text:p text:style-name="P28">【BFS 的執行過程（走法）】</text:p>
            <text:p text:style-name="P21">取出 A → 掃描 A 的 List → 看 B、C → 加入 Queue</text:p>
            <text:p text:style-name="P21">取出 B → 掃描 B 的 List → 看 A（跳過）、D、E → 加入 Queue</text:p>
            <text:p text:style-name="P21">取出 C → 掃描 C 的 List → 看 A（跳過）</text:p>
            <text:p text:style-name="P21">取出 D → 掃描 D 的 List → 看 B（跳過）</text:p>
            <text:p text:style-name="P21">取出 E → 掃描 E 的 List → 看 B（跳過）</text:p>
            <text:p text:style-name="P6"/>
            <text:p text:style-name="P21">觀察：<text:span text:style-name="T154">BFS 執行一遍</text:span>，<text:span text:style-name="T88">恰好把 A、B、C、D、E 的 Adjacency List</text:span></text:p>
            <text:p text:style-name="P31">全部從頭到尾各掃描了一次！</text:p>
          </table:table-cell>
        </table:table-row>
      </table:table>
      <text:p text:style-name="P5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0">▎ 從這裡直接推導出 O(V+E)</text:p>
          </table:table-cell>
        </table:table-row>
        <table:table-row table:style-name="表格56.1">
          <table:table-cell table:style-name="表格56.A2" office:value-type="string">
            <text:p text:style-name="P21">O(V) 的來源：</text:p>
            <text:p text:style-name="P21"><text:s text:c="2"/><text:span text:style-name="T152">每個頂點最多進出 Queue 一次</text:span></text:p>
            <text:p text:style-name="P21"><text:span text:style-name="T152"><text:s text:c="2"/>→ 共 V 個頂點</text:span> → <text:span text:style-name="T64">O(V)</text:span></text:p>
            <text:p text:style-name="P6"/>
            <text:p text:style-name="P21">O(E) 的來源（本質！）：</text:p>
            <text:p text:style-name="P21"><text:s text:c="2"/><text:span text:style-name="T152">所有 Adjacency List 中的鄰居節點，加起來總共有 2E 個</text:span></text:p>
            <text:p text:style-name="P21"><text:s text:c="2"/>（<text:span text:style-name="T98">每條邊出現在兩個頂點的串列各一次</text:span>）</text:p>
            <text:p text:style-name="P21"><text:s text:c="2"/><text:span text:style-name="T117">BFS 把它們全部掃描了一遍 → O(2E) = O(E</text:span><text:span text:style-name="T77">)</text:span></text:p>
            <text:p text:style-name="P6"/>
            <text:p text:style-name="P21">合計：<text:span text:style-name="T64">O(V) + O(E) = O(V + E)</text:span></text:p>
            <text:p text:style-name="P6"/>
            <text:p text:style-name="P21">口訣：</text:p>
            <text:p text:style-name="P22">O(V) = 每個頂點進出 Queue 一次</text:p>
            <text:p text:style-name="P31">O(E) = 所有 Adjacency List 被掃描一遍</text:p>
          </table:table-cell>
        </table:table-row>
      </table:table>
      <text:p text:style-name="P5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20">▎ 改用 Adjacency Matrix 時，為什麼變成 O(V²)？</text:p>
          </table:table-cell>
        </table:table-row>
        <table:table-row table:style-name="表格57.1">
          <table:table-cell table:style-name="表格57.A2" office:value-type="string">
            <text:p text:style-name="P21">Adjacency Matrix 例子：</text:p>
            <text:p text:style-name="P6"/>
            <text:p text:style-name="P21"><text:s text:c="5"/>A <text:s/>B <text:s/>C <text:s/>D</text:p>
            <text:p text:style-name="P21"><text:s text:c="2"/>A[ 0 <text:s/>1 <text:s/>1 <text:s/>0 ]</text:p>
            <text:p text:style-name="P21"><text:s text:c="2"/>B[ 1 <text:s/>0 <text:s/>0 <text:s/>1 ]</text:p>
            <text:p text:style-name="P21"><text:s text:c="2"/>C[ 1 <text:s/>0 <text:s/>0 <text:s/>0 ]</text:p>
            <text:p text:style-name="P6"><text:soft-page-break/><text:span text:style-name="T156"><text:s text:c="2"/>D[ 0 <text:s/>1 <text:s/>0 <text:s/>0 ]</text:span></text:p>
            <text:p text:style-name="P6"/>
            <text:p text:style-name="P32">BFS 處理頂點 A 時，不再是走一條短短的 Adjacency List，</text:p>
            <text:p text:style-name="P21"><text:span text:style-name="T76">而是必須掃描矩陣整列</text:span>：</text:p>
            <text:p text:style-name="P6"/>
            <text:p text:style-name="P21"><text:s text:c="2"/>matrix[A][0] → matrix[A][1] → matrix[A][2] → matrix[A][3]</text:p>
            <text:p text:style-name="P6"/>
            <text:p text:style-name="P33">無論這一列有幾個 1，都要掃完整的 V 格 → O(V)</text:p>
            <text:p text:style-name="P6"/>
            <text:p text:style-name="P21">V 個頂點都這樣做：V × O(V) = O(V²)</text:p>
            <text:p text:style-name="P6"/>
            <text:p text:style-name="P21">這就是為什麼<text:span text:style-name="T64">改用 Matrix，BFS 時間就從 O(V+E) 變成 O(V²)</text:span>。</text:p>
          </table:table-cell>
        </table:table-row>
      </table:table>
      <text:p text:style-name="P5"/>
      <table:table table:name="表格58" table:style-name="表格58">
        <table:table-column table:style-name="表格58.A"/>
        <table:table-column table:style-name="表格58.B"/>
        <table:table-column table:style-name="表格58.C"/>
        <table:table-column table:style-name="表格58.D"/>
        <table:table-row table:style-name="表格58.1">
          <table:table-cell table:style-name="表格58.A1" table:number-columns-spanned="4" office:value-type="string">
            <text:p text:style-name="P20">▎ 三種表示法對 BFS / DFS 時間複雜度的影響</text:p>
          </table:table-cell>
          <table:covered-table-cell/>
          <table:covered-table-cell/>
          <table:covered-table-cell/>
        </table:table-row>
        <table:table-row table:style-name="表格58.1">
          <table:table-cell table:style-name="表格58.A2" office:value-type="string">
            <text:p text:style-name="P23">表示法</text:p>
          </table:table-cell>
          <table:table-cell table:style-name="表格58.A2" office:value-type="string">
            <text:p text:style-name="P23">BFS 時間</text:p>
          </table:table-cell>
          <table:table-cell table:style-name="表格58.A2" office:value-type="string">
            <text:p text:style-name="P23">DFS 時間</text:p>
          </table:table-cell>
          <table:table-cell table:style-name="表格58.A2" office:value-type="string">
            <text:p text:style-name="P23">原因</text:p>
          </table:table-cell>
        </table:table-row>
        <table:table-row table:style-name="表格58.1">
          <table:table-cell table:style-name="表格58.A3" office:value-type="string">
            <text:p text:style-name="P24">Adjacency Matrix</text:p>
          </table:table-cell>
          <table:table-cell table:style-name="表格58.A3" office:value-type="string">
            <text:p text:style-name="P24">O(V²)</text:p>
          </table:table-cell>
          <table:table-cell table:style-name="表格58.A3" office:value-type="string">
            <text:p text:style-name="P24">O(V²)</text:p>
          </table:table-cell>
          <table:table-cell table:style-name="表格58.A3" office:value-type="string">
            <text:p text:style-name="P24">每個頂點需掃描整列（O(V)）× V 個頂點</text:p>
          </table:table-cell>
        </table:table-row>
        <table:table-row table:style-name="表格58.1">
          <table:table-cell table:style-name="表格58.A3" office:value-type="string">
            <text:p text:style-name="P24">Adjacency List</text:p>
          </table:table-cell>
          <table:table-cell table:style-name="表格58.A3" office:value-type="string">
            <text:p text:style-name="P24">O(V+E)</text:p>
          </table:table-cell>
          <table:table-cell table:style-name="表格58.A3" office:value-type="string">
            <text:p text:style-name="P24">O(V+E)</text:p>
          </table:table-cell>
          <table:table-cell table:style-name="表格58.A3" office:value-type="string">
            <text:p text:style-name="P24">掃描各頂點的 Adjacency List，加總剛好 O(V+E)</text:p>
          </table:table-cell>
        </table:table-row>
        <table:table-row table:style-name="表格58.1">
          <table:table-cell table:style-name="表格58.A3" office:value-type="string">
            <text:p text:style-name="P24">Adjacency Multilist</text:p>
          </table:table-cell>
          <table:table-cell table:style-name="表格58.A3" office:value-type="string">
            <text:p text:style-name="P24">O(V+E)</text:p>
          </table:table-cell>
          <table:table-cell table:style-name="表格58.A3" office:value-type="string">
            <text:p text:style-name="P24">O(V+E)</text:p>
          </table:table-cell>
          <table:table-cell table:style-name="表格58.A3" office:value-type="string">
            <text:p text:style-name="P24"><text:span text:style-name="T176">同 List</text:span>，<text:span text:style-name="T178">邊節點只存一份但邏輯等價</text:span></text:p>
          </table:table-cell>
        </table:table-row>
      </table:table>
      <text:p text:style-name="P5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21">⚠ 考試重點：</text:p>
            <text:p text:style-name="P21"><text:s text:c="3"/>題目若問<text:span text:style-name="T113">「BFS 時間複雜度 O(V+E)」，</text:span></text:p>
            <text:p text:style-name="P21"><text:span text:style-name="T113"><text:s text:c="3"/>預設前提是 Graph 採用 Adjacency List 或 Adjacency Multilist 儲存</text:span>。</text:p>
            <text:p text:style-name="P21"><text:s text:c="3"/><text:span text:style-name="T128">若題目明確說明使用 Adjacency Matrix，則答案改為 O(V²)</text:span>。</text:p>
            <text:p text:style-name="P21"><text:s text:c="3"/>兩種情況都是公職考試常出現的細節，務必區分！</text:p>
          </table:table-cell>
        </table:table-row>
      </table:table>
      <text:p text:style-name="P5"/>
      <text:h text:style-name="P34" text:outline-level="1" loext:marker-style-name="T4"><text:span text:style-name="T3">四、</text:span><text:span text:style-name="T4">DFS</text:span><text:span text:style-name="T3">（深度優先搜尋）─ 含完整圖解</text:span></text:h>
      <text:p text:style-name="P12" loext:marker-style-name="T33"><text:span text:style-name="T40">Depth-First Search</text:span><text:span text:style-name="T32">｜使用 </text:span><text:span text:style-name="T40">Stack</text:span><text:span text:style-name="T32">（</text:span><text:span text:style-name="T40">LIFO </text:span><text:span text:style-name="T32">堆疊）</text:span></text:p>
      <text:p text:style-name="P1"/>
      <text:h text:style-name="P36" text:outline-level="2" loext:marker-style-name="T12"><text:span text:style-name="T12">4-1 </text:span><text:span text:style-name="T13">核心概念圖解</text:span></text:h>
      <text:p text:style-name="P13" loext:marker-style-name="T7"><text:span text:style-name="T16"><text:s text:c="2"/>▎ </text:span><text:span text:style-name="T6">為什麼叫「深度」優先？</text:span>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" loext:marker-style-name="T47"><text:span text:style-name="T47"><text:s text:c="2"/>同一張圖：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9"/>A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7"/>/ <text:s text:c="2"/>\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5"/>B <text:s text:c="6"/>C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4"/>/ \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13"/>D <text:s text:c="2"/>E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DFS 從 A 出發，先一路衝到底：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A → B（往深處走）→ D（繼續往深處）→ 無路了，退回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→ E（繼續往深處）→ 無路了，退回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→ 退回 A → C（A 的另一個鄰居）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輸出順序：A → B → D → E → C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" loext:marker-style-name="T47"><text:span text:style-name="T47"><text:s text:c="2"/>比喻：走迷宮，一條路走到底，死路才退回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4-2 DFS </text:span><text:span text:style-name="T13">逐步追蹤（用 </text:span><text:span text:style-name="T12">Stack </text:span><text:span text:style-name="T13">詳細步驟）</text:span></text:h>
      <text:p text:style-name="P13" loext:marker-style-name="T7"><text:span text:style-name="T16"><text:s text:c="2"/>▎ </text:span><text:span text:style-name="T6">使用相同圖形，從 </text:span><text:span text:style-name="T16">A </text:span><text:span text:style-name="T6">開始 </text:span><text:span text:style-name="T16">DFS</text:span><text:span text:style-name="T6">：</text:span>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row table:style-name="表格30.1">
          <table:table-cell table:style-name="表格30.A1" office:value-type="string">
            <text:p text:style-name="P10" loext:marker-style-name="T131"><text:span text:style-name="T130">步</text:span><text:span text:style-name="T131"/></text:p>
          </table:table-cell>
          <table:table-cell table:style-name="表格30.A1" office:value-type="string">
            <text:p text:style-name="P3" loext:marker-style-name="T131"><text:span text:style-name="T130">動作</text:span><text:span text:style-name="T131"/></text:p>
          </table:table-cell>
          <table:table-cell table:style-name="表格30.A1" office:value-type="string">
            <text:p text:style-name="P10" loext:marker-style-name="T131"><text:span text:style-name="T134">Stack </text:span><text:span text:style-name="T130">狀態（右</text:span><text:span text:style-name="T134">=</text:span><text:span text:style-name="T130">頂端）</text:span></text:p>
          </table:table-cell>
          <table:table-cell table:style-name="表格30.A1" office:value-type="string">
            <text:p text:style-name="P10" loext:marker-style-name="T131"><text:span text:style-name="T130">已拜訪</text:span><text:span text:style-name="T131"/></text:p>
          </table:table-cell>
          <table:table-cell table:style-name="表格30.A1" office:value-type="string">
            <text:p text:style-name="P10" loext:marker-style-name="T131"><text:span text:style-name="T130">輸出</text:span><text:span text:style-name="T131"/></text:p>
          </table:table-cell>
        </table:table-row>
        <table:table-row table:style-name="表格30.1">
          <table:table-cell table:style-name="表格30.A2" office:value-type="string">
            <text:p text:style-name="P10" loext:marker-style-name="T24"><text:span text:style-name="T23">初始</text:span><text:span text:style-name="T24"/></text:p>
          </table:table-cell>
          <table:table-cell table:style-name="表格30.A2" office:value-type="string">
            <text:p text:style-name="P3" loext:marker-style-name="T33"><text:span text:style-name="T40">push </text:span><text:span text:style-name="T32">起點 </text:span><text:span text:style-name="T40">A</text:span></text:p>
          </table:table-cell>
          <table:table-cell table:style-name="表格30.A2" office:value-type="string">
            <text:p text:style-name="P10" loext:marker-style-name="T43"><text:span text:style-name="T43">[ A ]</text:span><text:span text:style-name="T43"/></text:p>
          </table:table-cell>
          <table:table-cell table:style-name="表格30.A2" office:value-type="string">
            <text:p text:style-name="P10" loext:marker-style-name="T33"><text:span text:style-name="T40">{A}</text:span><text:span text:style-name="T33"/></text:p>
          </table:table-cell>
          <table:table-cell table:style-name="表格30.A2" office:value-type="string">
            <text:p text:style-name="P10" loext:marker-style-name="T33"><text:span text:style-name="T32">（空）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10" loext:marker-style-name="T24"><text:span text:style-name="T28">①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A → </text:span><text:span text:style-name="T32">輸出 </text:span><text:span text:style-name="T40">A push </text:span><text:span text:style-name="T32">鄰居 </text:span><text:span text:style-name="T40">C</text:span><text:span text:style-name="T32">、</text:span><text:span text:style-name="T40">B</text:span><text:span text:style-name="T32">（</text:span><text:span text:style-name="T40">C</text:span><text:span text:style-name="T32">先</text:span><text:span text:style-name="T40">push → B</text:span><text:span text:style-name="T32">後</text:span><text:span text:style-name="T40">push</text:span><text:span text:style-name="T32">，</text:span><text:span text:style-name="T40">B</text:span><text:span text:style-name="T32">先</text:span><text:span text:style-name="T40">pop</text:span><text:span text:style-name="T32">）</text:span></text:p>
          </table:table-cell>
          <table:table-cell table:style-name="表格30.A3" office:value-type="string">
            <text:p text:style-name="P10" loext:marker-style-name="T43"><text:span text:style-name="T43">[ C, B ] <text:s/>← B在頂</text:span><text:span text:style-name="T43"/></text:p>
          </table:table-cell>
          <table:table-cell table:style-name="表格30.A3" office:value-type="string">
            <text:p text:style-name="P10" loext:marker-style-name="T33"><text:span text:style-name="T40">{A,B,C}</text:span><text:span text:style-name="T33"/></text:p>
          </table:table-cell>
          <table:table-cell table:style-name="表格30.A3" office:value-type="string">
            <text:p text:style-name="P10" loext:marker-style-name="T33"><text:span text:style-name="T40">A</text:span><text:span text:style-name="T33"/></text:p>
          </table:table-cell>
        </table:table-row>
        <table:table-row table:style-name="表格30.1">
          <table:table-cell table:style-name="表格30.A2" office:value-type="string">
            <text:p text:style-name="P10" loext:marker-style-name="T24"><text:span text:style-name="T28">②</text:span><text:span text:style-name="T24"/></text:p>
          </table:table-cell>
          <table:table-cell table:style-name="表格30.A2" office:value-type="string">
            <text:p text:style-name="P3" loext:marker-style-name="T33"><text:span text:style-name="T40">pop B → </text:span><text:span text:style-name="T32">輸出 </text:span><text:span text:style-name="T40">B push </text:span><text:span text:style-name="T32">鄰居 </text:span><text:span text:style-name="T40">E</text:span><text:span text:style-name="T32">、</text:span><text:span text:style-name="T40">D</text:span><text:span text:style-name="T32">（</text:span><text:span text:style-name="T40">D</text:span><text:span text:style-name="T32">在頂）</text:span></text:p>
          </table:table-cell>
          <table:table-cell table:style-name="表格30.A2" office:value-type="string">
            <text:p text:style-name="P10" loext:marker-style-name="T43"><text:span text:style-name="T43">[ C, E, D ] <text:s/>← D在頂</text:span><text:span text:style-name="T43"/></text:p>
          </table:table-cell>
          <table:table-cell table:style-name="表格30.A2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2" office:value-type="string">
            <text:p text:style-name="P10" loext:marker-style-name="T33"><text:span text:style-name="T40">A B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10" loext:marker-style-name="T24"><text:span text:style-name="T28">③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D → </text:span><text:span text:style-name="T32">輸出 </text:span><text:span text:style-name="T40">D </text:span><text:span text:style-name="T32">無未拜訪鄰居</text:span></text:p>
          </table:table-cell>
          <table:table-cell table:style-name="表格30.A3" office:value-type="string">
            <text:p text:style-name="P10" loext:marker-style-name="T43"><text:span text:style-name="T43">[ C, E ] <text:s/>← E在頂</text:span><text:span text:style-name="T43"/></text:p>
          </table:table-cell>
          <table:table-cell table:style-name="表格30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3" office:value-type="string">
            <text:p text:style-name="P10" loext:marker-style-name="T33"><text:span text:style-name="T40">A B D</text:span><text:span text:style-name="T33"/></text:p>
          </table:table-cell>
        </table:table-row>
        <table:table-row table:style-name="表格30.1">
          <table:table-cell table:style-name="表格30.A2" office:value-type="string">
            <text:p text:style-name="P10" loext:marker-style-name="T24"><text:span text:style-name="T28">④</text:span><text:span text:style-name="T24"/></text:p>
          </table:table-cell>
          <table:table-cell table:style-name="表格30.A2" office:value-type="string">
            <text:p text:style-name="P3" loext:marker-style-name="T33"><text:span text:style-name="T40">pop E → </text:span><text:span text:style-name="T32">輸出 </text:span><text:span text:style-name="T40">E </text:span><text:span text:style-name="T32">無未拜訪鄰居</text:span></text:p>
          </table:table-cell>
          <table:table-cell table:style-name="表格30.A2" office:value-type="string">
            <text:p text:style-name="P10" loext:marker-style-name="T43"><text:span text:style-name="T43">[ C ] <text:s/>← C在頂</text:span><text:span text:style-name="T43"/></text:p>
          </table:table-cell>
          <table:table-cell table:style-name="表格30.A2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2" office:value-type="string">
            <text:p text:style-name="P10" loext:marker-style-name="T33"><text:span text:style-name="T40">A B D E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10" loext:marker-style-name="T24"><text:span text:style-name="T28">⑤</text:span><text:span text:style-name="T24"/></text:p>
          </table:table-cell>
          <table:table-cell table:style-name="表格30.A3" office:value-type="string">
            <text:p text:style-name="P3" loext:marker-style-name="T33"><text:span text:style-name="T40">pop C → </text:span><text:span text:style-name="T32">輸出 </text:span><text:span text:style-name="T40">C </text:span><text:span text:style-name="T32">無未拜訪鄰居</text:span></text:p>
          </table:table-cell>
          <table:table-cell table:style-name="表格30.A3" office:value-type="string">
            <text:p text:style-name="P10" loext:marker-style-name="T43"><text:span text:style-name="T43">[ ]（空）</text:span><text:span text:style-name="T43"/></text:p>
          </table:table-cell>
          <table:table-cell table:style-name="表格30.A3" office:value-type="string">
            <text:p text:style-name="P10" loext:marker-style-name="T33"><text:span text:style-name="T40">{A,B,C,D,E}</text:span><text:span text:style-name="T33"/></text:p>
          </table:table-cell>
          <table:table-cell table:style-name="表格30.A3" office:value-type="string">
            <text:p text:style-name="P10" loext:marker-style-name="T142"><text:span text:style-name="T140">A B D E C</text:span><text:span text:style-name="T142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為什麼 </text:span><text:span text:style-name="T16">Stack </text:span><text:span text:style-name="T6">能做到「深度優先」？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2" loext:marker-style-name="T47"><text:span text:style-name="T47"><text:s text:c="2"/>LIFO（後進先出）的特性：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從 A pop 出來後，push B 和 C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Stack: [ C, B ] <text:s/>← B 在頂端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下一步 pop 出 B（不是 C！）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優先往 B 的方向深入，而非切換到 C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這就是「深度優先」！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ext:soft-page-break/>
        <table:table-row table:style-name="表格31.1">
          <table:table-cell table:style-name="表格31.A1" office:value-type="string">
            <text:p text:style-name="P2" loext:marker-style-name="T47"><text:span text:style-name="T47"><text:s text:c="2"/>要等 B 這一支全部走完（pop 出 D、E）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Stack 才回到 C：[ C ]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7"><text:span text:style-name="T47"><text:s text:c="2"/>→ 這就是「Backtracking（回溯）」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4-3 DFS </text:span><text:span text:style-name="T13">時間與空間複雜度推導</text:span></text:h>
      <text:p text:style-name="P13" loext:marker-style-name="T7"><text:span text:style-name="T16"><text:s text:c="2"/>▎ </text:span><text:span text:style-name="T6">時間複雜度：</text:span><text:span text:style-name="T16">O(V + E)</text:span></text:p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2" loext:marker-style-name="T47"><text:span text:style-name="T47"><text:s text:c="2"/>每個頂點最多被 push / pop 一次 <text:s/>→ O(V)</text:span><text:span text:style-name="T47"/></text:p>
          </table:table-cell>
        </table:table-row>
        <table:table-row table:style-name="表格32.1">
          <table:table-cell table:style-name="表格32.A1" office:value-type="string">
            <text:p text:style-name="P2" loext:marker-style-name="T47"><text:span text:style-name="T47"><text:s text:c="2"/>每條邊在處理時被檢查兩次 <text:s text:c="7"/>→ O(E)</text:span><text:span text:style-name="T47"/></text:p>
          </table:table-cell>
        </table:table-row>
        <table:table-row table:style-name="表格32.1">
          <table:table-cell table:style-name="表格32.A1" office:value-type="string">
            <text:p text:style-name="P2" loext:marker-style-name="T47"><text:span text:style-name="T47"><text:s text:c="2"/>總計：O(V + E) <text:s/>（和 BFS 相同）</text:span><text:span text:style-name="T47"/></text:p>
          </table:table-cell>
        </table:table-row>
      </table:table>
      <text:p text:style-name="P13" loext:marker-style-name="T7"><text:span text:style-name="T16"><text:s text:c="2"/>▎ </text:span><text:span text:style-name="T6">空間複雜度：</text:span><text:span text:style-name="T16">O(V)</text:span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" loext:marker-style-name="T47"><text:span text:style-name="T47"><text:s text:c="2"/>Stack 最多放多少頂點？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最壞情況（如星形圖：中心頂點 A 直接連接所有其他頂點）：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從 A 出發，pop A 後，將鄰居 B、C、D...全部 push 進 Stack ，此時 Stack 同時有 V-1 個待探索頂點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7"><text:span text:style-name="T47"><text:s text:c="2"/>→ O(V)</text:span><text:span text:style-name="T47"/></text:p>
          </table:table-cell>
        </table:table-row>
      </table:table>
      <text:p text:style-name="P17" loext:marker-style-name="T145"><text:span text:style-name="T145"><text:s text:c="2"/>▎ ⚠ 重要前提：O(V+E) 成立的條件（同 BFS）</text:span><text:span text:style-name="T145"/></text:p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8" loext:marker-style-name="T146"><text:span text:style-name="T146"><text:s text:c="2"/>DFS 的 O(V+E) 同樣以 Adjacency List 或 Multilist 為前提。</text:span><text:span text:style-name="T146"/></text:p>
            <text:p text:style-name="P2" loext:marker-style-name="T147"><text:span text:style-name="T147"><text:s text:c="2"/>改用 Adjacency Matrix 時，每個頂點需掃描完整的一列才能找到所有鄰居，</text:span><text:span text:style-name="T147"/></text:p>
            <text:p text:style-name="P25" loext:marker-style-name="T147"><text:span text:style-name="T147"><text:s text:c="2"/>共 V 個頂點 × O(V) = O(V²)。這是公職考試常考的細節，務必記住！</text:span><text:span text:style-name="T147"/></text:p>
          </table:table-cell>
        </table:table-row>
      </table:table>
      <text:h text:style-name="P36" text:outline-level="2" loext:marker-style-name="T12"><text:span text:style-name="T12">4-4 BFS vs DFS </text:span><text:span text:style-name="T13">核心差異</text:span></text:h>
      <text:p text:style-name="P13" loext:marker-style-name="T7"><text:span text:style-name="T16"><text:s text:c="2"/>▎ </text:span><text:span text:style-name="T6">視覺化比較</text:span>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" loext:marker-style-name="T47"><text:span text:style-name="T47"><text:s text:c="2"/>同一張圖：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7"/>1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5"/>/ <text:s text:c="2"/>\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4"/>2 <text:s text:c="4"/>3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3"/>/ \ <text:s text:c="2"/>/ \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12"/>4 <text:s text:c="2"/>5 6 <text:s text:c="2"/>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BFS 訪問順序（Queue）：1, 2, 3, 4, 5, 6, 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（一層一層橫向展開）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DFS 訪問順序（Stack）：1, 2, 4, 5, 3, 6, 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7"><text:span text:style-name="T47"><text:s text:c="2"/>（沿著一條路衝到底，再回頭）</text:span><text:span text:style-name="T47"/></text:p>
          </table:table-cell>
        </table:table-row>
      </table:table>
      <text:p text:style-name="P1"/>
      <table:table table:name="表格36" table:style-name="表格36">
        <table:table-column table:style-name="表格36.A"/>
        <table:table-column table:style-name="表格36.B" table:number-columns-repeated="2"/>
        <table:table-row table:style-name="表格36.1">
          <table:table-cell table:style-name="表格36.A1" office:value-type="string">
            <text:p text:style-name="P3" loext:marker-style-name="T131"><text:span text:style-name="T130">項目</text:span><text:span text:style-name="T131"/></text:p>
          </table:table-cell>
          <table:table-cell table:style-name="表格36.A1" office:value-type="string">
            <text:p text:style-name="P10" loext:marker-style-name="T131"><text:span text:style-name="T134">BFS</text:span><text:span text:style-name="T130">（廣度優先）</text:span></text:p>
          </table:table-cell>
          <table:table-cell table:style-name="表格36.A1" office:value-type="string">
            <text:p text:style-name="P10" loext:marker-style-name="T131"><text:span text:style-name="T134">DFS</text:span><text:span text:style-name="T130">（深度優先）</text:span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資料結構</text:span><text:span text:style-name="T36"/></text:p>
          </table:table-cell>
          <table:table-cell table:style-name="表格36.B2" office:value-type="string">
            <text:p text:style-name="P10" loext:marker-style-name="T9"><text:span text:style-name="T17">Queue</text:span><text:span text:style-name="T8">（先進先出）</text:span></text:p>
          </table:table-cell>
          <table:table-cell table:style-name="表格36.C2" office:value-type="string">
            <text:p text:style-name="P10" loext:marker-style-name="T24"><text:span text:style-name="T28">Stack</text:span><text:span text:style-name="T23">（後進先出）</text:span></text:p>
          </table:table-cell>
        </table:table-row>
        <table:table-row table:style-name="表格36.1">
          <table:table-cell table:style-name="表格36.A3" office:value-type="string">
            <text:p text:style-name="P3" loext:marker-style-name="T36"><text:span text:style-name="T35">記憶口訣</text:span><text:span text:style-name="T36"/></text:p>
          </table:table-cell>
          <table:table-cell table:style-name="表格36.B3" office:value-type="string">
            <text:p text:style-name="P10" loext:marker-style-name="T149"><text:span text:style-name="T148">B → Q</text:span><text:span text:style-name="T149"/></text:p>
          </table:table-cell>
          <table:table-cell table:style-name="表格36.B3" office:value-type="string">
            <text:p text:style-name="P10" loext:marker-style-name="T149"><text:span text:style-name="T148">D → S</text:span><text:span text:style-name="T149"/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探索方向</text:span><text:span text:style-name="T36"/></text:p>
          </table:table-cell>
          <table:table-cell table:style-name="表格36.A3" office:value-type="string">
            <text:p text:style-name="P10" loext:marker-style-name="T33"><text:span text:style-name="T32">橫向（層次展開）</text:span><text:span text:style-name="T33"/></text:p>
          </table:table-cell>
          <table:table-cell table:style-name="表格36.A3" office:value-type="string">
            <text:p text:style-name="P10" loext:marker-style-name="T33"><text:span text:style-name="T32">縱向（深入到底）</text:span><text:span text:style-name="T33"/></text:p>
          </table:table-cell>
        </table:table-row>
        <table:table-row table:style-name="表格36.1">
          <table:table-cell table:style-name="表格36.A3" office:value-type="string">
            <text:p text:style-name="P3" loext:marker-style-name="T36"><text:span text:style-name="T35">時間複雜度</text:span><text:span text:style-name="T36"/></text:p>
          </table:table-cell>
          <table:table-cell table:style-name="表格36.B5" office:value-type="string">
            <text:p text:style-name="P10" loext:marker-style-name="T144"><text:span text:style-name="T141">O(V+E)</text:span><text:span text:style-name="T144"/></text:p>
          </table:table-cell>
          <table:table-cell table:style-name="表格36.B5" office:value-type="string">
            <text:p text:style-name="P10" loext:marker-style-name="T144"><text:span text:style-name="T141">O(V+E)</text:span><text:span text:style-name="T144"/></text:p>
          </table:table-cell>
        </table:table-row>
        <table:table-row table:style-name="表格36.1">
          <table:table-cell table:style-name="表格36.A2" office:value-type="string">
            <text:p text:style-name="P3" loext:marker-style-name="T36"><text:span text:style-name="T35">空間複雜度</text:span><text:span text:style-name="T36"/></text:p>
          </table:table-cell>
          <table:table-cell table:style-name="表格36.A2" office:value-type="string">
            <text:p text:style-name="P10" loext:marker-style-name="T33"><text:span text:style-name="T40">O(V)</text:span><text:span text:style-name="T33"/></text:p>
          </table:table-cell>
          <table:table-cell table:style-name="表格36.A2" office:value-type="string">
            <text:p text:style-name="P10" loext:marker-style-name="T33"><text:span text:style-name="T40">O(V)</text:span><text:span text:style-name="T33"/></text:p>
          </table:table-cell>
        </table:table-row>
      </table:table>
      <text:p text:style-name="Standard"/>
      <text:h text:style-name="P34" text:outline-level="1" loext:marker-style-name="T4"><text:span text:style-name="T3">五、</text:span><text:span text:style-name="T4">Topological Sort</text:span><text:span text:style-name="T3">（拓樸排序）─ 含完整圖解</text:span></text:h>
      <text:p text:style-name="P1"/>
      <text:h text:style-name="P36" text:outline-level="2" loext:marker-style-name="T12"><text:span text:style-name="T12">5-1 </text:span><text:span text:style-name="T13">什麼是拓樸排序？</text:span></text:h>
      <text:p text:style-name="P13" loext:marker-style-name="T7"><text:span text:style-name="T16"><text:s text:c="2"/>▎ </text:span><text:span text:style-name="T6">生活例子</text:span>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" loext:marker-style-name="T47"><text:span text:style-name="T47"><text:s text:c="2"/>穿衣服的順序（你不能反著來）：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內衣 → 穿襯衫 → 穿外套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內褲 → 穿褲子 → 穿皮帶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穿襪子 → 穿鞋子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這就是 DAG + Topological Sort 的概念：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7"><text:span text:style-name="T47"><text:s text:c="2"/>有「先後依賴關係」的任務排序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5-2 In-degree </text:span><text:span text:style-name="T13">圖解</text:span></text:h>
      <text:p text:style-name="P13" loext:marker-style-name="T7"><text:span text:style-name="T16"><text:s text:c="2"/>▎ </text:span><text:span text:style-name="T6">什麼是 </text:span><text:span text:style-name="T16">in-degree</text:span><text:span text:style-name="T6">？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" loext:marker-style-name="T47"><text:span text:style-name="T47"><text:s text:c="2"/>圖形：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30"/>in-degree：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① <text:s/>──────────→ <text:s/>④ <text:s text:c="8"/>① = 0（沒有箭頭指進來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① <text:s/>──→ <text:s/>③ <text:s/>──→ <text:s/>④ <text:s text:c="8"/>② = 0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② <text:s/>──────────→ <text:s/>③ <text:s text:c="8"/>③ = 2（① 和 ② 都指向 ③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4"/>② <text:s/>──→ <text:s/>④ <text:s text:c="16"/>④ = 3（①②③都指向它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2"/>in-degree = 0 的頂點 → 沒有前置依賴 → 可以最先完成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7"><text:span text:style-name="T47"><text:s text:c="2"/>此例：① 和 ② 可以先做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5-3 Kahn's Algorithm </text:span><text:span text:style-name="T13">逐步圖解</text:span></text:h>
      <text:p text:style-name="P13" loext:marker-style-name="T7"><text:span text:style-name="T16"><text:s text:c="2"/>▎ </text:span><text:span text:style-name="T6">使用圖形：課程修課依賴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2" loext:marker-style-name="T47"><text:span text:style-name="T47"><text:s text:c="2"/>節點代表課程，邊代表「先修要求」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數學(M) ──→ 線代(L) ──→ 機器學習(ML)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16"/>│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統計(S) ──→ 機率(P) ──→ 機器學習(ML)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" loext:marker-style-name="T47"><text:span text:style-name="T47"><text:s text:c="2"/>in-degree：M=0 <text:s/>S=0 <text:s/>L=1 <text:s/>P=1 <text:s/>ML=2</text:span><text:span text:style-name="T47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每一步驟狀態追蹤：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row table:style-name="表格40.1">
          <table:table-cell table:style-name="表格40.A1" office:value-type="string">
            <text:p text:style-name="P10" loext:marker-style-name="T131"><text:span text:style-name="T130">步</text:span><text:span text:style-name="T131"/></text:p>
          </table:table-cell>
          <table:table-cell table:style-name="表格40.A1" office:value-type="string">
            <text:p text:style-name="P3" loext:marker-style-name="T131"><text:span text:style-name="T130">動作</text:span><text:span text:style-name="T131"/></text:p>
          </table:table-cell>
          <table:table-cell table:style-name="表格40.A1" office:value-type="string">
            <text:p text:style-name="P10" loext:marker-style-name="T131"><text:span text:style-name="T130">各頂點 </text:span><text:span text:style-name="T134">in-degree</text:span></text:p>
          </table:table-cell>
          <table:table-cell table:style-name="表格40.A1" office:value-type="string">
            <text:p text:style-name="P10" loext:marker-style-name="T131"><text:span text:style-name="T134">Queue</text:span><text:span text:style-name="T131"/></text:p>
          </table:table-cell>
          <table:table-cell table:style-name="表格40.A1" office:value-type="string">
            <text:p text:style-name="P10" loext:marker-style-name="T131"><text:span text:style-name="T130">輸出</text:span><text:span text:style-name="T131"/></text:p>
          </table:table-cell>
        </table:table-row>
        <table:table-row table:style-name="表格40.1">
          <table:table-cell table:style-name="表格40.A2" office:value-type="string">
            <text:p text:style-name="P10" loext:marker-style-name="T24"><text:span text:style-name="T23">初始</text:span><text:span text:style-name="T24"/></text:p>
          </table:table-cell>
          <table:table-cell table:style-name="表格40.A2" office:value-type="string">
            <text:p text:style-name="P3" loext:marker-style-name="T33"><text:span text:style-name="T32">計算所有 </text:span><text:span text:style-name="T40">in-degree </text:span><text:span text:style-name="T32">將 </text:span><text:span text:style-name="T40">in-degree=0 </text:span><text:span text:style-name="T32">的放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0 S=0 L=1 P=1 ML=2</text:span><text:span text:style-name="T44"/></text:p>
          </table:table-cell>
          <table:table-cell table:style-name="表格40.A2" office:value-type="string">
            <text:p text:style-name="P10" loext:marker-style-name="T43"><text:span text:style-name="T43">[ M, S ]</text:span><text:span text:style-name="T43"/></text:p>
          </table:table-cell>
          <table:table-cell table:style-name="表格40.A2" office:value-type="string">
            <text:p text:style-name="P10" loext:marker-style-name="T33"><text:span text:style-name="T32">（空）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10" loext:marker-style-name="T24"><text:span text:style-name="T28">①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M → </text:span><text:span text:style-name="T32">輸出 </text:span><text:span text:style-name="T40">M </text:span><text:span text:style-name="T32">刪除 </text:span><text:span text:style-name="T40">M→L</text:span><text:span text:style-name="T32">，</text:span><text:span text:style-name="T40">L </text:span><text:span text:style-name="T32">的 </text:span><text:span text:style-name="T40">in-degree </text:span><text:span text:style-name="T32">從 </text:span><text:span text:style-name="T40">1→0 → </text:span><text:span text:style-name="T32">將 </text:span><text:span text:style-name="T40">L </text:span><text:span text:style-name="T32">加入 </text:span><text:span text:style-name="T40">Queue</text:span></text:p>
          </table:table-cell>
          <table:table-cell table:style-name="表格40.A3" office:value-type="string">
            <text:p text:style-name="P3" loext:marker-style-name="T44"><text:span text:style-name="T44">M=✓ S=0 L=0 P=1 ML=2</text:span><text:span text:style-name="T44"/></text:p>
          </table:table-cell>
          <table:table-cell table:style-name="表格40.A3" office:value-type="string">
            <text:p text:style-name="P10" loext:marker-style-name="T43"><text:span text:style-name="T43">[ S, L ]</text:span><text:span text:style-name="T43"/></text:p>
          </table:table-cell>
          <table:table-cell table:style-name="表格40.A3" office:value-type="string">
            <text:p text:style-name="P10" loext:marker-style-name="T33"><text:span text:style-name="T40">M</text:span><text:span text:style-name="T33"/></text:p>
          </table:table-cell>
        </table:table-row>
        <table:table-row table:style-name="表格40.1">
          <table:table-cell table:style-name="表格40.A2" office:value-type="string">
            <text:p text:style-name="P10" loext:marker-style-name="T24"><text:span text:style-name="T28">②</text:span><text:span text:style-name="T24"/></text:p>
          </table:table-cell>
          <table:table-cell table:style-name="表格40.A2" office:value-type="string">
            <text:p text:style-name="P3" loext:marker-style-name="T33"><text:span text:style-name="T32">取出 </text:span><text:span text:style-name="T40">S → </text:span><text:span text:style-name="T32">輸出 </text:span><text:span text:style-name="T40">S </text:span><text:span text:style-name="T32">刪除 </text:span><text:span text:style-name="T40">S→P</text:span><text:span text:style-name="T32">，</text:span><text:span text:style-name="T40">P </text:span><text:span text:style-name="T32">的 </text:span><text:span text:style-name="T40">in-degree </text:span><text:span text:style-name="T32">從 </text:span><text:span text:style-name="T40">1→0 → </text:span><text:span text:style-name="T32">將 </text:span><text:span text:style-name="T40">P </text:span><text:span text:style-name="T32">加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✓ S=✓ L=0 P=0 ML=2</text:span><text:span text:style-name="T44"/></text:p>
          </table:table-cell>
          <table:table-cell table:style-name="表格40.A2" office:value-type="string">
            <text:p text:style-name="P10" loext:marker-style-name="T43"><text:span text:style-name="T43">[ L, P ]</text:span><text:span text:style-name="T43"/></text:p>
          </table:table-cell>
          <table:table-cell table:style-name="表格40.A2" office:value-type="string">
            <text:p text:style-name="P10" loext:marker-style-name="T33"><text:span text:style-name="T40">M S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10" loext:marker-style-name="T24"><text:span text:style-name="T28">③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L → </text:span><text:span text:style-name="T32">輸出 </text:span><text:span text:style-name="T40">L </text:span><text:span text:style-name="T32">刪除 </text:span><text:span text:style-name="T40">L→ML</text:span><text:span text:style-name="T32">，</text:span><text:span text:style-name="T40">ML </text:span><text:span text:style-name="T32">的 </text:span><text:span text:style-name="T40">in-degree 2→1</text:span></text:p>
          </table:table-cell>
          <table:table-cell table:style-name="表格40.A3" office:value-type="string">
            <text:p text:style-name="P3" loext:marker-style-name="T44"><text:span text:style-name="T44">M=✓ S=✓ L=✓ P=0 ML=1</text:span><text:span text:style-name="T44"/></text:p>
          </table:table-cell>
          <table:table-cell table:style-name="表格40.A3" office:value-type="string">
            <text:p text:style-name="P10" loext:marker-style-name="T43"><text:span text:style-name="T43">[ P ]</text:span><text:span text:style-name="T43"/></text:p>
          </table:table-cell>
          <table:table-cell table:style-name="表格40.A3" office:value-type="string">
            <text:p text:style-name="P10" loext:marker-style-name="T33"><text:span text:style-name="T40">M S L</text:span><text:span text:style-name="T33"/>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10" loext:marker-style-name="T24"><text:span text:style-name="T28">④</text:span><text:span text:style-name="T24"/></text:p>
          </table:table-cell>
          <table:table-cell table:style-name="表格40.A2" office:value-type="string">
            <text:p text:style-name="P3" loext:marker-style-name="T33"><text:span text:style-name="T32">取出 </text:span><text:span text:style-name="T40">P → </text:span><text:span text:style-name="T32">輸出 </text:span><text:span text:style-name="T40">P </text:span><text:span text:style-name="T32">刪除 </text:span><text:span text:style-name="T40">P→ML</text:span><text:span text:style-name="T32">，</text:span><text:span text:style-name="T40">ML </text:span><text:span text:style-name="T32">的 </text:span><text:span text:style-name="T40">in-degree 1→0 → </text:span><text:span text:style-name="T32">將 </text:span><text:span text:style-name="T40">ML </text:span><text:span text:style-name="T32">加入 </text:span><text:span text:style-name="T40">Queue</text:span></text:p>
          </table:table-cell>
          <table:table-cell table:style-name="表格40.A2" office:value-type="string">
            <text:p text:style-name="P3" loext:marker-style-name="T44"><text:span text:style-name="T44">M=✓ S=✓ L=✓ P=✓ ML=0</text:span><text:span text:style-name="T44"/></text:p>
          </table:table-cell>
          <table:table-cell table:style-name="表格40.A2" office:value-type="string">
            <text:p text:style-name="P10" loext:marker-style-name="T43"><text:span text:style-name="T43">[ ML ]</text:span><text:span text:style-name="T43"/></text:p>
          </table:table-cell>
          <table:table-cell table:style-name="表格40.A2" office:value-type="string">
            <text:p text:style-name="P10" loext:marker-style-name="T33"><text:span text:style-name="T40">M S L P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10" loext:marker-style-name="T24"><text:span text:style-name="T28">⑤</text:span><text:span text:style-name="T24"/></text:p>
          </table:table-cell>
          <table:table-cell table:style-name="表格40.A3" office:value-type="string">
            <text:p text:style-name="P3" loext:marker-style-name="T33"><text:span text:style-name="T32">取出 </text:span><text:span text:style-name="T40">ML → </text:span><text:span text:style-name="T32">輸出 </text:span><text:span text:style-name="T40">ML </text:span><text:span text:style-name="T32">無後繼節點，</text:span><text:span text:style-name="T40">Queue </text:span><text:span text:style-name="T32">空</text:span></text:p>
          </table:table-cell>
          <table:table-cell table:style-name="表格40.A3" office:value-type="string">
            <text:p text:style-name="P10" loext:marker-style-name="T44"><text:span text:style-name="T44">全部 ✓</text:span><text:span text:style-name="T44"/></text:p>
          </table:table-cell>
          <table:table-cell table:style-name="表格40.A3" office:value-type="string">
            <text:p text:style-name="P10" loext:marker-style-name="T43"><text:span text:style-name="T43">[ ]（空）</text:span><text:span text:style-name="T43"/></text:p>
          </table:table-cell>
          <table:table-cell table:style-name="表格40.A3" office:value-type="string">
            <text:p text:style-name="P10" loext:marker-style-name="T142"><text:span text:style-name="T140">M S L P ML</text:span><text:span text:style-name="T142"/></text:p>
          </table:table-cell>
        </table:table-row>
      </table:table>
      <text:p text:style-name="P1"/>
      <text:h text:style-name="P36" text:outline-level="2" loext:marker-style-name="T12"><text:span text:style-name="T12">5-4 </text:span><text:span text:style-name="T13">為什麼有 </text:span><text:span text:style-name="T12">Cycle </text:span><text:span text:style-name="T13">就無法排序？（圖解）</text:span>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" loext:marker-style-name="T47"><text:span text:style-name="T47"><text:s text:c="2"/>有 Cycle 的圖：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A ──→ B ──→ C ──→ A <text:s/>（形成環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in-degree 計算：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A) = 1 <text:s/>（C→A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B) = 1 <text:s/>（A→B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4"/>in-degree(C) = 1 <text:s/>（B→C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所有頂點的 in-degree 都 ≥ 1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Queue 永遠是空的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演算法無法取出任何頂點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2" loext:marker-style-name="T47"><text:span text:style-name="T47"><text:s text:c="2"/>→ 輸出序列長度 &lt; V → 偵測到 Cycle！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5-5 Topological Sort </text:span><text:span text:style-name="T13">時間複雜度推導</text:span>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2" loext:marker-style-name="T47"><text:span text:style-name="T47"><text:s text:c="2"/>Kahn's Algorithm 分析：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① 計算所有 in-degree <text:s text:c="9"/>→ 掃描所有邊 <text:s/>O(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② 初始化 Queue（in-degree=0）→ 掃描所有頂點 O(V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③ 每個頂點最多進出 Queue 一次 → O(V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④ 每條邊最多被刪除一次 <text:s text:c="7"/>→ O(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總時間複雜度：O(V + 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2" loext:marker-style-name="T47"><text:span text:style-name="T47"><text:s text:c="2"/>空間複雜度：O(V)（Queue 最多 V 個頂點）</text:span><text:span text:style-name="T47"/></text:p>
          </table:table-cell>
        </table:table-row>
      </table:table>
      <text:p text:style-name="Standard"/>
      <text:h text:style-name="P34" text:outline-level="1" loext:marker-style-name="T4"><text:span text:style-name="T3">六、</text:span><text:span text:style-name="T4">Prim </text:span><text:span text:style-name="T3">演算法（</text:span><text:span text:style-name="T4">MST</text:span><text:span text:style-name="T3">）─ 含完整圖解</text:span></text:h>
      <text:p text:style-name="P1"/>
      <text:h text:style-name="P36" text:outline-level="2" loext:marker-style-name="T12"><text:span text:style-name="T12">6-1 MST </text:span><text:span text:style-name="T13">是什麼？圖解說明</text:span></text:h>
      <text:p text:style-name="P13" loext:marker-style-name="T7"><text:span text:style-name="T16"><text:s text:c="2"/>▎ </text:span><text:span text:style-name="T6">問題：如何用最少成本把所有城市接通網路？</text:span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2" loext:marker-style-name="T47"><text:span text:style-name="T47"><text:s text:c="2"/>圖形（V={T,W,X,Y,Z}）：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/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T ─2─ W ─4─ X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|\ <text:s text:c="3"/>| <text:s text:c="4"/>|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1 7 <text:s text:c="2"/>3 <text:s text:c="4"/>6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| <text:s/>\ <text:s/>| <text:s text:c="4"/>|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7"/>Y <text:s text:c="2"/>──Z─────┘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/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2"/>所有邊：(T,W)=2 <text:s/>(T,Y)=1 <text:s/>(T,Z)=7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9"/>(W,X)=4 <text:s/>(W,Z)=3 <text:s/>(X,Z)=6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/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2"/>目標：選最少成本的 V-1=4 條邊，讓所有頂點相連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2" loext:marker-style-name="T47"><text:span text:style-name="T47"><text:s text:c="8"/>且不能形成 Cycle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6-2 Prim </text:span><text:span text:style-name="T13">演算法逐步圖解（從 </text:span><text:span text:style-name="T12">X </text:span><text:span text:style-name="T13">出發）</text:span></text:h>
      <text:p text:style-name="P13" loext:marker-style-name="T7"><text:span text:style-name="T16"><text:s text:c="2"/>▎ </text:span><text:span text:style-name="T6">每一步選「連接樹與非樹頂點之間，最短的邊」：</text:span></text:p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E"/>
        <table:table-row table:style-name="表格44.1">
          <table:table-cell table:style-name="表格44.A1" office:value-type="string">
            <text:p text:style-name="P10" loext:marker-style-name="T131"><text:span text:style-name="T130">步</text:span><text:span text:style-name="T131"/></text:p>
          </table:table-cell>
          <table:table-cell table:style-name="表格44.A1" office:value-type="string">
            <text:p text:style-name="P3" loext:marker-style-name="T131"><text:span text:style-name="T130">候選邊（樹 ↔ 非樹）</text:span><text:span text:style-name="T131"/></text:p>
          </table:table-cell>
          <table:table-cell table:style-name="表格44.A1" office:value-type="string">
            <text:p text:style-name="P3" loext:marker-style-name="T131"><text:span text:style-name="T130">選擇（最小）</text:span><text:span text:style-name="T131"/></text:p>
          </table:table-cell>
          <table:table-cell table:style-name="表格44.A1" office:value-type="string">
            <text:p text:style-name="P10" loext:marker-style-name="T131"><text:span text:style-name="T130">目前樹</text:span><text:span text:style-name="T131"/></text:p>
          </table:table-cell>
          <table:table-cell table:style-name="表格44.A1" office:value-type="string">
            <text:p text:style-name="P10" loext:marker-style-name="T131"><text:span text:style-name="T130">累計</text:span><text:span text:style-name="T131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3">出發</text:span><text:span text:style-name="T24"/></text:p>
          </table:table-cell>
          <table:table-cell table:style-name="表格44.B2" office:value-type="string">
            <text:p text:style-name="P3" loext:marker-style-name="T33"><text:span text:style-name="T32">樹</text:span><text:span text:style-name="T40">={X} <text:s/></text:span><text:span text:style-name="T32">非樹</text:span><text:span text:style-name="T40">={T,W,Y,Z}</text:span></text:p>
          </table:table-cell>
          <table:table-cell table:style-name="表格44.B2" office:value-type="string">
            <text:p text:style-name="P3" loext:marker-style-name="T33"><text:span text:style-name="T32">選起點 </text:span><text:span text:style-name="T40">X</text:span><text:span text:style-name="T32">，加入樹</text:span></text:p>
          </table:table-cell>
          <table:table-cell table:style-name="表格44.B2" office:value-type="string">
            <text:p text:style-name="P10" loext:marker-style-name="T33"><text:span text:style-name="T40">{X}</text:span><text:span text:style-name="T33"/></text:p>
          </table:table-cell>
          <table:table-cell table:style-name="表格44.B2" office:value-type="string">
            <text:p text:style-name="P10" loext:marker-style-name="T33"><text:span text:style-name="T40">0</text:span><text:span text:style-name="T33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8">①</text:span><text:span text:style-name="T24"/></text:p>
          </table:table-cell>
          <table:table-cell table:style-name="表格44.B3" office:value-type="string">
            <text:p text:style-name="P3" loext:marker-style-name="T33"><text:span text:style-name="T40">(X,W)=4 <text:s/>← </text:span><text:span text:style-name="T32">最小 </text:span><text:span text:style-name="T40">(X,Z)=6</text:span></text:p>
          </table:table-cell>
          <table:table-cell table:style-name="表格44.C3" office:value-type="string">
            <text:p text:style-name="P3" loext:marker-style-name="T142"><text:span text:style-name="T143">選 </text:span><text:span text:style-name="T140">(X,W)=4 </text:span><text:span text:style-name="T143">加入 </text:span><text:span text:style-name="T140">W</text:span></text:p>
          </table:table-cell>
          <table:table-cell table:style-name="表格44.B3" office:value-type="string">
            <text:p text:style-name="P10" loext:marker-style-name="T33"><text:span text:style-name="T40">{X,W}</text:span><text:span text:style-name="T33"/></text:p>
          </table:table-cell>
          <table:table-cell table:style-name="表格44.B3" office:value-type="string">
            <text:p text:style-name="P10" loext:marker-style-name="T142"><text:span text:style-name="T140">4</text:span><text:span text:style-name="T142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8">②</text:span><text:span text:style-name="T24"/></text:p>
          </table:table-cell>
          <table:table-cell table:style-name="表格44.B2" office:value-type="string">
            <text:p text:style-name="P3" loext:marker-style-name="T33"><text:span text:style-name="T40">(W,T)=2 <text:s/>← </text:span><text:span text:style-name="T32">最小 </text:span><text:span text:style-name="T40">(W,Z)=3 (X,Z)=6</text:span></text:p>
          </table:table-cell>
          <table:table-cell table:style-name="表格44.C3" office:value-type="string">
            <text:p text:style-name="P3" loext:marker-style-name="T142"><text:span text:style-name="T143">選 </text:span><text:span text:style-name="T140">(W,T)=2 </text:span><text:span text:style-name="T143">加入 </text:span><text:span text:style-name="T140">T</text:span></text:p>
          </table:table-cell>
          <table:table-cell table:style-name="表格44.B2" office:value-type="string">
            <text:p text:style-name="P10" loext:marker-style-name="T33"><text:span text:style-name="T40">{X,W,T}</text:span><text:span text:style-name="T33"/></text:p>
          </table:table-cell>
          <table:table-cell table:style-name="表格44.B2" office:value-type="string">
            <text:p text:style-name="P10" loext:marker-style-name="T142"><text:span text:style-name="T140">4+2=6</text:span><text:span text:style-name="T142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8">③</text:span><text:span text:style-name="T24"/></text:p>
          </table:table-cell>
          <table:table-cell table:style-name="表格44.B3" office:value-type="string">
            <text:p text:style-name="P3" loext:marker-style-name="T33"><text:span text:style-name="T40">(T,Y)=1 <text:s/>← </text:span><text:span text:style-name="T32">最小 </text:span><text:span text:style-name="T40">(W,Z)=3 (X,Z)=6 (T,Z)=7</text:span></text:p>
          </table:table-cell>
          <table:table-cell table:style-name="表格44.C3" office:value-type="string">
            <text:p text:style-name="P3" loext:marker-style-name="T142"><text:span text:style-name="T143">選 </text:span><text:span text:style-name="T140">(T,Y)=1 </text:span><text:span text:style-name="T143">加入 </text:span><text:span text:style-name="T140">Y</text:span></text:p>
          </table:table-cell>
          <table:table-cell table:style-name="表格44.B3" office:value-type="string">
            <text:p text:style-name="P10" loext:marker-style-name="T33"><text:span text:style-name="T40">{X,W,T,Y}</text:span><text:span text:style-name="T33"/></text:p>
          </table:table-cell>
          <table:table-cell table:style-name="表格44.B3" office:value-type="string">
            <text:p text:style-name="P10" loext:marker-style-name="T142"><text:span text:style-name="T140">6+1=7</text:span><text:span text:style-name="T142"/></text:p>
          </table:table-cell>
        </table:table-row>
        <table:table-row table:style-name="表格44.1">
          <table:table-cell table:style-name="表格44.A2" office:value-type="string">
            <text:p text:style-name="P10" loext:marker-style-name="T24"><text:span text:style-name="T28">④</text:span><text:span text:style-name="T24"/></text:p>
          </table:table-cell>
          <table:table-cell table:style-name="表格44.B2" office:value-type="string">
            <text:p text:style-name="P3" loext:marker-style-name="T33"><text:span text:style-name="T40">(W,Z)=3 <text:s/>← </text:span><text:span text:style-name="T32">最小 </text:span><text:span text:style-name="T40">(X,Z)=6 (T,Z)=7</text:span></text:p>
          </table:table-cell>
          <table:table-cell table:style-name="表格44.C3" office:value-type="string">
            <text:p text:style-name="P3" loext:marker-style-name="T142"><text:span text:style-name="T143">選 </text:span><text:span text:style-name="T140">(W,Z)=3 </text:span><text:span text:style-name="T143">加入 </text:span><text:span text:style-name="T140">Z</text:span><text:span text:style-name="T143">（完成！）</text:span></text:p>
          </table:table-cell>
          <table:table-cell table:style-name="表格44.B2" office:value-type="string">
            <text:p text:style-name="P10" loext:marker-style-name="T33"><text:span text:style-name="T40">{X,W,T,Y,Z}</text:span><text:span text:style-name="T33"/></text:p>
          </table:table-cell>
          <table:table-cell table:style-name="表格44.E6" office:value-type="string">
            <text:p text:style-name="P10" loext:marker-style-name="T149"><text:span text:style-name="T148">7+3=10★</text:span><text:span text:style-name="T149"/></text:p>
          </table:table-cell>
        </table:table-row>
      </table:table>
      <text:p text:style-name="P1"/>
      <text:p text:style-name="P13" loext:marker-style-name="T7"><text:span text:style-name="T16"><text:s text:c="2"/>▎ </text:span><text:span text:style-name="T6">最終 </text:span><text:span text:style-name="T16">MST </text:span><text:span text:style-name="T6">圖示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2" loext:marker-style-name="T47"><text:span text:style-name="T47"><text:s text:c="2"/>MST 結果（選出的 4 條邊）：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/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T ─2─ W ─4─ X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| <text:s text:c="4"/>│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1 <text:s text:c="4"/>3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| <text:s text:c="4"/>│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7"/>Y <text:s text:c="4"/>Z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/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2"/>選出：X-W(4) <text:s/>W-T(2) <text:s/>T-Y(1) <text:s/>W-Z(3)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2"/>總權重 = 4 + 2 + 1 + 3 = 10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2"/>
          </table:table-cell>
        </table:table-row>
        <table:table-row table:style-name="表格45.1">
          <table:table-cell table:style-name="表格45.A1" office:value-type="string">
            <text:p text:style-name="P2" loext:marker-style-name="T47"><text:span text:style-name="T47"><text:s text:c="2"/>未選：T-Z(7) <text:s/>X-Z(6) <text:s/>← 加入會形成 Cycle 或不是最小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6-3 Prim </text:span><text:span text:style-name="T13">時間複雜度推導</text:span></text:h>
      <text:p text:style-name="P13" loext:marker-style-name="T7"><text:span text:style-name="T16"><text:s text:c="2"/>▎ </text:span><text:span text:style-name="T6">使用相鄰矩陣：</text:span><text:span text:style-name="T16">O(V²)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" loext:marker-style-name="T47"><text:span text:style-name="T47"><text:s text:c="2"/>Prim 的核心操作：</text:span><text:span text:style-name="T47"/></text:p>
          </table:table-cell>
        </table:table-row>
        <text:soft-page-break/>
        <table:table-row table:style-name="表格46.1">
          <table:table-cell table:style-name="表格46.A1" office:value-type="string">
            <text:p text:style-name="P2" loext:marker-style-name="T47"><text:span text:style-name="T47"><text:s text:c="2"/>每一輪從「候選邊」中找最小的一條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/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2"/>使用矩陣的做法：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4"/>維護一個 dist[] 陣列，dist[v] = 目前連接 v 到樹的最小邊權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/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2"/>每一輪：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4"/>① 掃描所有 V 個頂點，找 dist 最小的 <text:s/>→ O(V)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4"/>② 更新鄰居的 dist <text:s text:c="19"/>→ 掃描矩陣第 u 列 → O(V)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/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2"/>總共執行 V 輪：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2" loext:marker-style-name="T47"><text:span text:style-name="T47"><text:s text:c="4"/>V 輪 × O(V) = O(V²)</text:span><text:span text:style-name="T47"/></text:p>
          </table:table-cell>
        </table:table-row>
      </table:table>
      <text:p text:style-name="P13" loext:marker-style-name="T7"><text:span text:style-name="T16"><text:s text:c="2"/>▎ </text:span><text:span text:style-name="T6">使用 </text:span><text:span text:style-name="T16">Binary Heap</text:span><text:span text:style-name="T6">（最小堆）：</text:span><text:span text:style-name="T16">O(E log V)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2" loext:marker-style-name="T47"><text:span text:style-name="T47"><text:s text:c="2"/>改用 Priority Queue（最小堆）儲存候選邊：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/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2"/>每一輪：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① 從堆中取出最小邊（extract-min） <text:s/>→ O(log V)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② 將新加入頂點的鄰居邊加入堆 <text:s text:c="6"/>→ O(log V) 每條邊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/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2"/>每條邊最多被加入堆一次 → 共 E 次 O(log V) 操作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總計：O(E log V)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/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2"/>比較：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稠密圖（E ≈ V²）：O(E log V) = O(V² log V) &gt; O(V²) → 矩陣更好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2" loext:marker-style-name="T47"><text:span text:style-name="T47"><text:s text:c="4"/>稀疏圖（E ≈ V） ：O(E log V) = O(V log V) <text:s/>&lt; O(V²) → 堆更好</text:span><text:span text:style-name="T47"/></text:p>
          </table:table-cell>
        </table:table-row>
      </table:table>
      <text:p text:style-name="Standard"/>
      <text:h text:style-name="P34" text:outline-level="1" loext:marker-style-name="T4"><text:span text:style-name="T3">七、</text:span><text:span text:style-name="T4">Adjacency Multilist </text:span><text:span text:style-name="T3">深度解析（含完整圖解）</text:span></text:h>
      <text:p text:style-name="P1"/>
      <text:h text:style-name="P36" text:outline-level="2" loext:marker-style-name="T12"><text:span text:style-name="T12">7-1 </text:span><text:span text:style-name="T13">問題：為什麼 </text:span><text:span text:style-name="T12">Adjacency List </text:span><text:span text:style-name="T13">還不夠好？</text:span></text:h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" loext:marker-style-name="T47"><text:span text:style-name="T47"><text:s text:c="2"/>Adjacency List 的問題：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/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圖形：A ── B ── C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9"/>\ <text:s text:c="6"/>/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10"/>───────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/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邊：(A,B) <text:s/>(B,C) <text:s/>(A,C) <text:s/>共 3 條邊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/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但 List 存法：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A → [B] → [C] → NULL <text:s text:c="5"/>（A-B、A-C 各存一份）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B → [A] → [C] → NULL <text:s text:c="5"/>（B-A、B-C 各存一份）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C → [A] → [B] → NULL <text:s text:c="5"/>（C-A、C-B 各存一份）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/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3 條邊，卻存了 6 個節點！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2" loext:marker-style-name="T47"><text:span text:style-name="T47"><text:s text:c="2"/>更新一條邊要改兩個地方（兩端都要改）→ 容易出錯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7-2 Multilist </text:span><text:span text:style-name="T13">解法：每條邊只存一次</text:span>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2" loext:marker-style-name="T47"><text:span text:style-name="T47"><text:s text:c="2"/>同一張圖，改用 Multilist：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只建立 3 個 Edge 節點：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e1: [V1=A | V2=B | link1=e2 | link2=e3]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7"/>A 的下一條邊↑ <text:s text:c="2"/>B 的下一條邊↑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e2: [V1=A | V2=C | link1=NULL | link2=e3]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7"/>A 無其他邊 ↑ <text:s text:c="3"/>C 的下一條邊↑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e3: [V1=B | V2=C | link1=NULL | link2=NULL]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7"/>B 無其他邊 ↑ <text:s text:c="3"/>C 無其他邊 ↑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/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頂點起始指標：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Vertex A → e1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Vertex B → e1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2" loext:marker-style-name="T47"><text:span text:style-name="T47"><text:s text:c="2"/>Vertex C → e2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7-3 </text:span><text:span text:style-name="T13">如何利用 </text:span><text:span text:style-name="T12">link1/link2 </text:span><text:span text:style-name="T13">走訪所有邊？</text:span>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2" loext:marker-style-name="T47"><text:span text:style-name="T47"><text:s text:c="2"/>走訪「頂點 A」的所有邊：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起點：A 的起始指標 → e1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/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e1 = (A,B)：A 是 V1 → 走 link1 → e2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e2 = (A,C)：A 是 V1 → 走 link1 → NULL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結束！A 的邊：(A,B) 和 (A,C) <text:s/>✓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/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走訪「頂點 B」的所有邊：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起點：B 的起始指標 → e1</text:span><text:span text:style-name="T47"/></text:p>
          </table:table-cell>
        </table:table-row>
        <text:soft-page-break/>
        <table:table-row table:style-name="表格50.1">
          <table:table-cell table:style-name="表格50.A1" office:value-type="string">
            <text:p text:style-name="P2"/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e1 = (A,B)：B 是 V2 → 走 link2 → e3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e3 = (B,C)：B 是 V1 → 走 link1 → NULL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結束！B 的邊：(A,B) 和 (B,C) <text:s/>✓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/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關鍵：同一個 Edge 節點，A 走 link1，B 走 link2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2" loext:marker-style-name="T47"><text:span text:style-name="T47"><text:s text:c="2"/>→ 兩端共用同一個節點，卻各自能找到下一條邊！</text:span><text:span text:style-name="T47"/></text:p>
          </table:table-cell>
        </table:table-row>
      </table:table>
      <text:p text:style-name="P1"/>
      <text:h text:style-name="P36" text:outline-level="2" loext:marker-style-name="T12"><text:span text:style-name="T12">7-4 </text:span><text:span text:style-name="T13">空間與時間複雜度完整推導</text:span></text:h>
      <text:p text:style-name="P13" loext:marker-style-name="T7"><text:span text:style-name="T16"><text:s text:c="2"/>▎ </text:span><text:span text:style-name="T6">空間比較</text:span></text:p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2" loext:marker-style-name="T47"><text:span text:style-name="T47"><text:s text:c="2"/>圖形有 V 個頂點，E 條邊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2"/>Adjacency List（無向圖）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V 個頂點節點 + 2E 個串列節點 = V + 2E = O(V+E)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2"/>Adjacency Multilist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V 個頂點節點 + E 個邊節點 = V + E = O(V+E)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→ 邊節點少了一半！（只存一份）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2"/>範例（V=100，E=1000）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List <text:s text:c="3"/>：100 + 2000 = 2100 個節點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2" loext:marker-style-name="T47"><text:span text:style-name="T47"><text:s text:c="4"/>Multilist：100 + 1000 = 1100 個節點（節省 47%）</text:span><text:span text:style-name="T47"/></text:p>
          </table:table-cell>
        </table:table-row>
      </table:table>
      <text:p text:style-name="P13" loext:marker-style-name="T7"><text:span text:style-name="T16"><text:s text:c="2"/>▎ </text:span><text:span text:style-name="T6">時間：計算所有頂點 </text:span><text:span text:style-name="T16">Degree</text:span></text:p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2" loext:marker-style-name="T47"><text:span text:style-name="T47"><text:s text:c="2"/>Matrix 做法：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掃描 n×n 矩陣中每一格 → O(n²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（即使 99% 的格子是 0，也要一格一格看）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2"/>Multilist 做法：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每個 Edge 節點被走訪兩次（V1 端一次，V2 端一次）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走訪所有 V 個頂點的起始指標 → O(V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走訪所有 E 個邊節點 × 2 <text:s text:c="4"/>→ O(E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總計：O(V + E) = O(n + e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2"/>差異對比（n=1000，e=10）：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Matrix <text:s text:c="3"/>→ 1,000,000 步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2" loext:marker-style-name="T47"><text:span text:style-name="T47"><text:s text:c="4"/>Multilist → <text:s text:c="5"/>1,020 步 <text:s/>（快 1000 倍！）</text:span><text:span text:style-name="T47"/></text:p>
          </table:table-cell>
        </table:table-row>
      </table:table>
      <text:h text:style-name="P35" text:outline-level="1" loext:marker-style-name="T4"><text:span text:style-name="T3">八、考試速查表（最終記憶版）</text:span><text:span text:style-name="T4"/>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3" loext:marker-style-name="T131"><text:span text:style-name="T130">主題</text:span><text:span text:style-name="T131"/></text:p>
          </table:table-cell>
          <table:table-cell table:style-name="表格53.A1" office:value-type="string">
            <text:p text:style-name="P10" loext:marker-style-name="T131"><text:span text:style-name="T130">關鍵字 </text:span><text:span text:style-name="T134">/ </text:span><text:span text:style-name="T130">公式</text:span></text:p>
          </table:table-cell>
          <table:table-cell table:style-name="表格53.A1" office:value-type="string">
            <text:p text:style-name="P3" loext:marker-style-name="T131"><text:span text:style-name="T130">補充說明</text:span><text:span text:style-name="T131"/></text:p>
          </table:table-cell>
        </table:table-row>
        <table:table-row table:style-name="表格53.1">
          <table:table-cell table:style-name="表格53.A2" office:value-type="string">
            <text:p text:style-name="P3" loext:marker-style-name="T9"><text:span text:style-name="T17">BFS</text:span><text:span text:style-name="T9"/></text:p>
          </table:table-cell>
          <table:table-cell table:style-name="表格53.A2" office:value-type="string">
            <text:p text:style-name="P10" loext:marker-style-name="T9"><text:span text:style-name="T17">Queue + FIFO</text:span><text:span text:style-name="T9"/></text:p>
          </table:table-cell>
          <table:table-cell table:style-name="表格53.C2" office:value-type="string">
            <text:p text:style-name="P3" loext:marker-style-name="T33"><text:span text:style-name="T40">B→Q</text:span><text:span text:style-name="T32">；時間</text:span><text:span text:style-name="T40">O(V+E)</text:span><text:span text:style-name="T32">；空間</text:span><text:span text:style-name="T40">O(V)</text:span><text:span text:style-name="T32">；</text:span><text:span text:style-name="T40">BFS </text:span><text:span text:style-name="T32">不依</text:span><text:span text:style-name="T40">cost</text:span><text:span text:style-name="T32">排序</text:span></text:p>
          </table:table-cell>
        </table:table-row>
        <table:table-row table:style-name="表格53.1">
          <table:table-cell table:style-name="表格53.A3" office:value-type="string">
            <text:p text:style-name="P3" loext:marker-style-name="T24"><text:span text:style-name="T28">DFS</text:span><text:span text:style-name="T24"/></text:p>
          </table:table-cell>
          <table:table-cell table:style-name="表格53.A3" office:value-type="string">
            <text:p text:style-name="P10" loext:marker-style-name="T24"><text:span text:style-name="T28">Stack + LIFO</text:span><text:span text:style-name="T24"/></text:p>
          </table:table-cell>
          <table:table-cell table:style-name="表格53.C3" office:value-type="string">
            <text:p text:style-name="P3" loext:marker-style-name="T33"><text:span text:style-name="T40">D→S</text:span><text:span text:style-name="T32">；時間</text:span><text:span text:style-name="T40">O(V+E)</text:span><text:span text:style-name="T32">；空間</text:span><text:span text:style-name="T40">O(V)</text:span><text:span text:style-name="T32">；欲走低</text:span><text:span text:style-name="T40">cost→</text:span><text:span text:style-name="T32">先</text:span><text:span text:style-name="T40">push</text:span><text:span text:style-name="T32">高</text:span><text:span text:style-name="T40">cost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Dense Graph</text:span><text:span text:style-name="T36"/></text:p>
          </table:table-cell>
          <table:table-cell table:style-name="表格53.A2" office:value-type="string">
            <text:p text:style-name="P10" loext:marker-style-name="T9"><text:span text:style-name="T17">Adjacency Matrix</text:span><text:span text:style-name="T9"/></text:p>
          </table:table-cell>
          <table:table-cell table:style-name="表格53.C2" office:value-type="string">
            <text:p text:style-name="P3" loext:marker-style-name="T33"><text:span text:style-name="T32">空間</text:span><text:span text:style-name="T40">O(V²)</text:span><text:span text:style-name="T32">；查邊</text:span><text:span text:style-name="T40">O(1)</text:span><text:span text:style-name="T32">；</text:span><text:span text:style-name="T40">Degree O(n²)</text:span><text:span text:style-name="T32">；</text:span><text:span text:style-name="T40">1bit/</text:span><text:span text:style-name="T32">格省空間</text:span></text:p>
          </table:table-cell>
        </table:table-row>
        <table:table-row table:style-name="表格53.1">
          <table:table-cell table:style-name="表格53.C3" office:value-type="string">
            <text:p text:style-name="P3" loext:marker-style-name="T36"><text:span text:style-name="T41">Sparse Graph</text:span><text:span text:style-name="T36"/></text:p>
          </table:table-cell>
          <table:table-cell table:style-name="表格53.A3" office:value-type="string">
            <text:p text:style-name="P10" loext:marker-style-name="T24"><text:span text:style-name="T28">List / Multilist</text:span><text:span text:style-name="T24"/></text:p>
          </table:table-cell>
          <table:table-cell table:style-name="表格53.C3" office:value-type="string">
            <text:p text:style-name="P3" loext:marker-style-name="T33"><text:span text:style-name="T32">空間</text:span><text:span text:style-name="T40">O(V+E)</text:span><text:span text:style-name="T32">；查邊</text:span><text:span text:style-name="T40">O(degree)</text:span><text:span text:style-name="T32">；</text:span><text:span text:style-name="T40">Degree O(n+e)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Topological Sort</text:span><text:span text:style-name="T36"/></text:p>
          </table:table-cell>
          <table:table-cell table:style-name="表格53.B6" office:value-type="string">
            <text:p text:style-name="P10" loext:marker-style-name="T149"><text:span text:style-name="T148">in-degree=0 </text:span><text:span text:style-name="T150">先出</text:span></text:p>
          </table:table-cell>
          <table:table-cell table:style-name="表格53.C2" office:value-type="string">
            <text:p text:style-name="P3" loext:marker-style-name="T33"><text:span text:style-name="T32">時間</text:span><text:span text:style-name="T40">O(V+E)</text:span><text:span text:style-name="T32">；空間</text:span><text:span text:style-name="T40">O(V)</text:span><text:span text:style-name="T32">；只適用 </text:span><text:span text:style-name="T40">DAG</text:span><text:span text:style-name="T32">；有</text:span><text:span text:style-name="T40">Cycle→</text:span><text:span text:style-name="T32">失敗</text:span></text:p>
          </table:table-cell>
        </table:table-row>
        <text:soft-page-break/>
        <table:table-row table:style-name="表格53.1">
          <table:table-cell table:style-name="表格53.C3" office:value-type="string">
            <text:p text:style-name="P3" loext:marker-style-name="T36"><text:span text:style-name="T35">有 </text:span><text:span text:style-name="T41">Cycle </text:span><text:span text:style-name="T35">的圖</text:span></text:p>
          </table:table-cell>
          <table:table-cell table:style-name="表格53.B7" office:value-type="string">
            <text:p text:style-name="P10" loext:marker-style-name="T136"><text:span text:style-name="T139">無法 </text:span><text:span text:style-name="T135">Topological Sort</text:span></text:p>
          </table:table-cell>
          <table:table-cell table:style-name="表格53.C3" office:value-type="string">
            <text:p text:style-name="P3" loext:marker-style-name="T33"><text:span text:style-name="T32">所有點 </text:span><text:span text:style-name="T40">in-degree&gt;0</text:span><text:span text:style-name="T32">，</text:span><text:span text:style-name="T40">Queue </text:span><text:span text:style-name="T32">永遠空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Prim + Matrix</text:span><text:span text:style-name="T36"/></text:p>
          </table:table-cell>
          <table:table-cell table:style-name="表格53.A2" office:value-type="string">
            <text:p text:style-name="P10" loext:marker-style-name="T9"><text:span text:style-name="T17">O(V²)</text:span><text:span text:style-name="T9"/></text:p>
          </table:table-cell>
          <table:table-cell table:style-name="表格53.C2" office:value-type="string">
            <text:p text:style-name="P3" loext:marker-style-name="T33"><text:span text:style-name="T32">每輪掃描 </text:span><text:span text:style-name="T40">V </text:span><text:span text:style-name="T32">個頂點找最小 </text:span><text:span text:style-name="T40">× V </text:span><text:span text:style-name="T32">輪</text:span></text:p>
          </table:table-cell>
        </table:table-row>
        <table:table-row table:style-name="表格53.1">
          <table:table-cell table:style-name="表格53.C3" office:value-type="string">
            <text:p text:style-name="P3" loext:marker-style-name="T36"><text:span text:style-name="T41">Prim + Heap</text:span><text:span text:style-name="T36"/></text:p>
          </table:table-cell>
          <table:table-cell table:style-name="表格53.A3" office:value-type="string">
            <text:p text:style-name="P10" loext:marker-style-name="T24"><text:span text:style-name="T28">O(E log V)</text:span><text:span text:style-name="T24"/></text:p>
          </table:table-cell>
          <table:table-cell table:style-name="表格53.C3" office:value-type="string">
            <text:p text:style-name="P3" loext:marker-style-name="T33"><text:span text:style-name="T32">每條邊 </text:span><text:span text:style-name="T40">O(log V)</text:span><text:span text:style-name="T32">；共 </text:span><text:span text:style-name="T40">E </text:span><text:span text:style-name="T32">條邊</text:span></text:p>
          </table:table-cell>
        </table:table-row>
        <table:table-row table:style-name="表格53.1">
          <table:table-cell table:style-name="表格53.C2" office:value-type="string">
            <text:p text:style-name="P3" loext:marker-style-name="T36"><text:span text:style-name="T41">Multilist </text:span><text:span text:style-name="T35">邊儲存</text:span></text:p>
          </table:table-cell>
          <table:table-cell table:style-name="表格53.B10" office:value-type="string">
            <text:p text:style-name="P10" loext:marker-style-name="T142"><text:span text:style-name="T143">每條邊只存一次</text:span><text:span text:style-name="T142"/></text:p>
          </table:table-cell>
          <table:table-cell table:style-name="表格53.C2" office:value-type="string">
            <text:p text:style-name="P3" loext:marker-style-name="T33"><text:span text:style-name="T40">List </text:span><text:span text:style-name="T32">存兩次；</text:span><text:span text:style-name="T40">Multilist </text:span><text:span text:style-name="T32">用 </text:span><text:span text:style-name="T40">link1/link2 </text:span><text:span text:style-name="T32">兩端共用</text:span></text:p>
          </table:table-cell>
        </table:table-row>
      </table:table>
      <text:p text:style-name="P1"/>
      <text:h text:style-name="P35" text:outline-level="1" loext:marker-style-name="T4"><text:span text:style-name="T3">九、常見申論題標準答案</text:span><text:span text:style-name="T4"/></text:h>
      <text:p text:style-name="P26" loext:marker-style-name="T26"><text:span text:style-name="T29">◆ Q1</text:span><text:span text:style-name="T25">：為什麼 </text:span><text:span text:style-name="T29">Adjacency Multilist </text:span><text:span text:style-name="T25">比 </text:span><text:span text:style-name="T29">Adjacency List </text:span><text:span text:style-name="T25">節省空間？</text:span></text:p>
      <text:p text:style-name="P27" loext:marker-style-name="T133"><text:span text:style-name="T132">標準答案</text:span><text:span text:style-name="T133"/></text:p>
      <text:p text:style-name="P12" loext:marker-style-name="T33"><text:span text:style-name="T40">Adjacency List </text:span><text:span text:style-name="T32">在無向圖中，同一條邊需在兩個頂點的串列各存一次（</text:span><text:span text:style-name="T40">A→B </text:span><text:span text:style-name="T32">與 </text:span><text:span text:style-name="T40">B→A </text:span><text:span text:style-name="T32">分別存放），</text:span><text:span text:style-name="T40">V </text:span><text:span text:style-name="T32">個頂點 </text:span><text:span text:style-name="T40">E </text:span><text:span text:style-name="T32">條邊共需 </text:span><text:span text:style-name="T40">V+2E </text:span><text:span text:style-name="T32">個節點。</text:span><text:span text:style-name="T40">Adjacency Multilist </text:span><text:span text:style-name="T32">每條邊只建立一個 </text:span><text:span text:style-name="T40">Edge </text:span><text:span text:style-name="T32">節點 </text:span><text:span text:style-name="T40">[V1, V2, link1, link2]</text:span><text:span text:style-name="T32">，由兩端頂點透過 </text:span><text:span text:style-name="T40">link1/link2 </text:span><text:span text:style-name="T32">共同指向，只需 </text:span><text:span text:style-name="T40">V+E </text:span><text:span text:style-name="T32">個節點，節省了 </text:span><text:span text:style-name="T40">E </text:span><text:span text:style-name="T32">個節點的空間，且修改一條邊只需更新一個節點。</text:span></text:p>
      <text:p text:style-name="P1"/>
      <text:p text:style-name="P26" loext:marker-style-name="T26"><text:span text:style-name="T29">◆ Q2</text:span><text:span text:style-name="T25">：為什麼有 </text:span><text:span text:style-name="T29">Cycle </text:span><text:span text:style-name="T25">的圖無法進行 </text:span><text:span text:style-name="T29">Topological Sort</text:span><text:span text:style-name="T25">？</text:span></text:p>
      <text:p text:style-name="P27" loext:marker-style-name="T133"><text:span text:style-name="T132">標準答案</text:span><text:span text:style-name="T133"/></text:p>
      <text:p text:style-name="P12" loext:marker-style-name="T33"><text:span text:style-name="T40">Kahn's Algorithm </text:span><text:span text:style-name="T32">依靠「找 </text:span><text:span text:style-name="T40">in-degree=0 </text:span><text:span text:style-name="T32">的頂點」作為起始。在含 </text:span><text:span text:style-name="T40">Cycle </text:span><text:span text:style-name="T32">的圖中（如 </text:span><text:span text:style-name="T40">A→B→C→A</text:span><text:span text:style-name="T32">），</text:span><text:span text:style-name="T40">Cycle </text:span><text:span text:style-name="T32">上每個頂點都有至少一條邊指向它，所有頂點的 </text:span><text:span text:style-name="T40">in-degree≥1</text:span><text:span text:style-name="T32">，沒有任何頂點能被選出，演算法結束時輸出頂點數 </text:span><text:span text:style-name="T40">&lt; V</text:span><text:span text:style-name="T32">，即代表存在 </text:span><text:span text:style-name="T40">Cycle</text:span><text:span text:style-name="T32">，無法完成拓樸排序。</text:span></text:p>
      <text:p text:style-name="P1"/>
      <text:p text:style-name="P26" loext:marker-style-name="T26"><text:span text:style-name="T29">◆ Q3</text:span><text:span text:style-name="T25">：比較 </text:span><text:span text:style-name="T29">Prim </text:span><text:span text:style-name="T25">使用矩陣 </text:span><text:span text:style-name="T29">O(V²) </text:span><text:span text:style-name="T25">與使用 </text:span><text:span text:style-name="T29">Heap O(E log V) </text:span><text:span text:style-name="T25">的原因</text:span></text:p>
      <text:p text:style-name="P27" loext:marker-style-name="T133"><text:span text:style-name="T132">標準答案</text:span><text:span text:style-name="T133"/></text:p>
      <text:p text:style-name="P12" loext:marker-style-name="T33"><text:span text:style-name="T32">使用 </text:span><text:span text:style-name="T40">Adjacency Matrix</text:span><text:span text:style-name="T32">：維護 </text:span><text:span text:style-name="T40">dist[] </text:span><text:span text:style-name="T32">陣列，每輪需掃描全部 </text:span><text:span text:style-name="T40">V </text:span><text:span text:style-name="T32">個頂點找最小距離（</text:span><text:span text:style-name="T40">O(V)</text:span><text:span text:style-name="T32">），更新鄰居也需掃描矩陣第 </text:span><text:span text:style-name="T40">u </text:span><text:span text:style-name="T32">列（</text:span><text:span text:style-name="T40">O(V)</text:span><text:span text:style-name="T32">），共執行 </text:span><text:span text:style-name="T40">V </text:span><text:span text:style-name="T32">輪，故總時間 </text:span><text:span text:style-name="T40">O(V²)</text:span><text:span text:style-name="T32">。適合稠密圖。</text:span></text:p>
      <text:p text:style-name="P12" loext:marker-style-name="T33"><text:span text:style-name="T32">使用 </text:span><text:span text:style-name="T40">Binary Heap</text:span><text:span text:style-name="T32">：用 </text:span><text:span text:style-name="T40">Priority Queue </text:span><text:span text:style-name="T32">維護候選邊，</text:span><text:span text:style-name="T40">extract-min </text:span><text:span text:style-name="T32">為 </text:span><text:span text:style-name="T40">O(log V)</text:span><text:span text:style-name="T32">，每條邊最多被插入 </text:span><text:span text:style-name="T40">Heap </text:span><text:span text:style-name="T32">一次（</text:span><text:span text:style-name="T40">O(log V)</text:span><text:span text:style-name="T32">），共 </text:span><text:span text:style-name="T40">E </text:span><text:span text:style-name="T32">條邊，故總時間 </text:span><text:span text:style-name="T40">O(E log V)</text:span><text:span text:style-name="T32">。適合稀疏圖。</text:span></text:p>
      <text:p text:style-name="P1"/>
      <text:p text:style-name="P26" loext:marker-style-name="T26"><text:span text:style-name="T29">◆ Q4</text:span><text:span text:style-name="T25">：</text:span><text:span text:style-name="T29">Matrix </text:span><text:span text:style-name="T25">計算所有 </text:span><text:span text:style-name="T29">Degree </text:span><text:span text:style-name="T25">為 </text:span><text:span text:style-name="T29">O(n²) vs Multilist </text:span><text:span text:style-name="T25">為 </text:span><text:span text:style-name="T29">O(n+e) </text:span><text:span text:style-name="T25">的原因</text:span></text:p>
      <text:p text:style-name="P27" loext:marker-style-name="T133"><text:span text:style-name="T132">標準答案</text:span><text:span text:style-name="T133"/></text:p>
      <text:p text:style-name="P12" loext:marker-style-name="T33"><text:span text:style-name="T40">Matrix</text:span><text:span text:style-name="T32">：計算頂點 </text:span><text:span text:style-name="T40">v </text:span><text:span text:style-name="T32">的 </text:span><text:span text:style-name="T40">Degree </text:span><text:span text:style-name="T32">需掃描第 </text:span><text:span text:style-name="T40">v </text:span><text:span text:style-name="T32">列 </text:span><text:span text:style-name="T40">n </text:span><text:span text:style-name="T32">個格子（</text:span><text:span text:style-name="T40">O(n)</text:span><text:span text:style-name="T32">）；計算全部 </text:span><text:span text:style-name="T40">n </text:span><text:span text:style-name="T32">個頂點共 </text:span><text:span text:style-name="T40">n×O(n)=O(n²)</text:span><text:span text:style-name="T32">，即使大部分格子是 </text:span><text:span text:style-name="T40">0 </text:span><text:span text:style-name="T32">也必須掃描。</text:span></text:p>
      <text:p text:style-name="P12" loext:marker-style-name="T33"><text:span text:style-name="T40">Multilist</text:span><text:span text:style-name="T32">：每個 </text:span><text:span text:style-name="T40">Edge </text:span><text:span text:style-name="T32">節點恰好被走訪兩次（</text:span><text:span text:style-name="T40">V1 </text:span><text:span text:style-name="T32">端與 </text:span><text:span text:style-name="T40">V2 </text:span><text:span text:style-name="T32">端各一次），加上走訪 </text:span><text:span text:style-name="T40">n </text:span><text:span text:style-name="T32">個頂點起始指標，共 </text:span><text:span text:style-name="T40">n+2e </text:span><text:span text:style-name="T32">步 </text:span><text:span text:style-name="T40">= O(n+e)</text:span><text:span text:style-name="T32">，完全不浪費在「不存在的邊」上。</text:span></text:p>
      <text:p text:style-name="P1"/>
      <text:p text:style-name="P11" loext:marker-style-name="T38"><text:span text:style-name="T37">本筆記整合圖片原始內容 </text:span><text:span text:style-name="T45">+ </text:span><text:span text:style-name="T37">逐步圖解 </text:span><text:span text:style-name="T45">+ </text:span><text:span text:style-name="T37">複雜度完整推導，適合準備台灣資訊類公職考試使用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12cm" style:contextual-spacing="false"/>
      <style:text-properties fo:color="#1e5fa8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88cm" fo:margin-bottom="0.141cm" style:contextual-spacing="false"/>
      <style:text-properties fo:color="#1e5fa8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fo:font-weight="bold" style:letter-kerning="false" style:font-name-asian="Arial2" style:font-family-asian="Arial" style:font-family-generic-asian="system" style:font-pitch-asian="variable" style:font-size-asian="10pt" style:language-asian="zh" style:country-asian="TW" style:font-weight-asian="bold" style:font-name-complex="Arial2" style:font-family-complex="Arial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8T00:34:27</meta:creation-date>
    <meta:initial-creator>Un-named</meta:initial-creator>
    <dc:language>en-US</dc:language>
    <dc:date>2026-06-09T17:16:38.515000000</dc:date>
    <meta:editing-cycles>140</meta:editing-cycles>
    <meta:editing-duration>PT16H14M44S</meta:editing-duration>
    <meta:generator>MODA_ODF_Application_Tools/3.8.4.2$Windows_X86_64 LibreOffice_project/4fb77107d5af14329e08085efe4fa19b5633383a</meta:generator>
    <meta:document-statistic meta:table-count="59" meta:image-count="0" meta:object-count="0" meta:page-count="22" meta:paragraph-count="841" meta:word-count="8416" meta:character-count="18579" meta:non-whitespace-character-count="13505"/>
    <meta:user-defined meta:name="AppVersion">15.0000</meta:user-defined>
  </office:meta>
</office:document-meta>
</file>