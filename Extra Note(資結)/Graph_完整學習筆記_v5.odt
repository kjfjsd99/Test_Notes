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878cm"/>
    </style:style>
    <style:style style:name="表格44.B" style:family="table-column">
      <style:table-column-properties style:column-width="6.174cm"/>
    </style:style>
    <style:style style:name="表格44.C" style:family="table-column">
      <style:table-column-properties style:column-width="5.549cm"/>
    </style:style>
    <style:style style:name="表格44.D" style:family="table-column">
      <style:table-column-properties style:column-width="2.473cm"/>
    </style:style>
    <style:style style:name="表格44.E" style:family="table-column">
      <style:table-column-properties style:column-width="2.117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0d7b6c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44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4.B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4.C3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44.E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6" style:family="paragraph" style:parent-style-name="Standard">
      <style:text-properties officeooo:paragraph-rsid="0043cb14"/>
    </style:style>
    <style:style style:name="P7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9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12" style:family="paragraph" style:parent-style-name="Standard">
      <style:paragraph-properties fo:margin-top="0.071cm" fo:margin-bottom="0.071cm" style:contextual-spacing="false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7" style:family="paragraph" style:parent-style-name="Standard">
      <style:paragraph-properties fo:margin-top="0.212cm" fo:margin-bottom="0.071cm" style:contextual-spacing="false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20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.106cm" style:contextual-spacing="false"/>
    </style:style>
    <style:style style:name="P25" style:family="paragraph" style:parent-style-name="Standard">
      <style:paragraph-properties fo:margin-top="0.318cm" fo:margin-bottom="0.106cm" style:contextual-spacing="false"/>
    </style:style>
    <style:style style:name="P26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27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8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29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30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31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2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58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59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61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18ffff" loext:opacity="100%" fo:background-color="#d500f9" loext:char-shading-value="0"/>
    </style:style>
    <style:style style:name="T63" style:family="text">
      <style:text-properties fo:color="#18ffff" loext:opacity="100%" fo:background-color="#d500f9" loext:char-shading-value="0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66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67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68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69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0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1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5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76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8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9" style:family="text">
      <style:text-properties fo:color="#ffff00" loext:opacity="100%"/>
    </style:style>
    <style:style style:name="T8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1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2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3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4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5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7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9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0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00e676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94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95" style:family="text">
      <style:text-properties fo:color="#ffd740" loext:opacity="100%"/>
    </style:style>
    <style:style style:name="T96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8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9" style:family="text">
      <style:text-properties fo:color="#ffd74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0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01" style:family="text">
      <style:text-properties fo:color="#ffd740" loext:opacity="100%" fo:background-color="#000000" loext:char-shading-value="0"/>
    </style:style>
    <style:style style:name="T102" style:family="text">
      <style:text-properties fo:color="#ffd740" loext:opacity="100%" fo:background-color="#000000" loext:char-shading-value="0"/>
    </style:style>
    <style:style style:name="T10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1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2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1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5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17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8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9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0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21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2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3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4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5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6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7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8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29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6b2e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1" style:family="text">
      <style:text-properties fo:color="#6b2e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2" style:family="text">
      <style:text-properties fo:color="#6b2e0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3" style:family="text">
      <style:text-properties fo:color="#6b2e0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4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35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7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8" style:family="text">
      <style:text-properties fo:font-weight="bold" fo:background-color="#ffd740" loext:char-shading-value="0" style:font-weight-asian="bold" style:font-weight-complex="bold"/>
    </style:style>
    <style:style style:name="T139" style:family="text">
      <style:text-properties fo:font-weight="bold" fo:background-color="#ffd740" loext:char-shading-value="0" style:font-weight-asian="bold" style:font-weight-complex="bold"/>
    </style:style>
    <style:style style:name="T140" style:family="text">
      <style:text-properties fo:font-weight="bold" fo:background-color="#ff4081" loext:char-shading-value="0" style:font-weight-asian="bold" style:font-weight-complex="bold"/>
    </style:style>
    <style:style style:name="T141" style:family="text">
      <style:text-properties fo:font-weight="bold" fo:background-color="#ffff00" loext:char-shading-value="0" style:font-weight-asian="bold" style:font-weight-complex="bold"/>
    </style:style>
    <style:style style:name="T142" style:family="text">
      <style:text-properties fo:font-weight="bold" fo:background-color="#76ff03" loext:char-shading-value="0" style:font-weight-asian="bold" style:font-weight-complex="bold"/>
    </style:style>
    <style:style style:name="T143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44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45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46" style:family="text">
      <style:text-properties fo:color="#64ffda" loext:opacity="100%"/>
    </style:style>
    <style:style style:name="T147" style:family="text">
      <style:text-properties fo:color="#448aff" loext:opacity="100%"/>
    </style:style>
    <style:style style:name="T148" style:family="text">
      <style:text-properties fo:color="#2979ff" loext:opacity="100%"/>
    </style:style>
    <style:style style:name="T149" style:family="text">
      <style:text-properties fo:background-color="#ffff00" loext:char-shading-value="0"/>
    </style:style>
    <style:style style:name="T150" style:family="text">
      <style:text-properties fo:background-color="#ffff00" loext:char-shading-value="0"/>
    </style:style>
    <style:style style:name="T151" style:family="text">
      <style:text-properties fo:background-color="#ffd740" loext:char-shading-value="0"/>
    </style:style>
    <style:style style:name="T152" style:family="text">
      <style:text-properties fo:background-color="#ffd740" loext:char-shading-value="0"/>
    </style:style>
    <style:style style:name="T153" style:family="text">
      <style:text-properties fo:background-color="#ff4081" loext:char-shading-value="0"/>
    </style:style>
    <style:style style:name="T154" style:family="text">
      <style:text-properties fo:background-color="#ff4081" loext:char-shading-value="0"/>
    </style:style>
    <style:style style:name="T155" style:family="text">
      <style:text-properties fo:background-color="#76ff03" loext:char-shading-value="0"/>
    </style:style>
    <style:style style:name="T156" style:family="text">
      <style:text-properties fo:background-color="#76ff0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1">圖形 </text:span><text:span text:style-name="T15">(Graph) </text:span><text:span text:style-name="T1">完整學習筆記</text:span></text:p>
      <text:p text:style-name="P8" loext:marker-style-name="T20"><text:span text:style-name="T19">BFS · DFS · Topological Sort · Prim MST · Adjacency Multilist</text:span><text:span text:style-name="T20"/></text:p>
      <text:p text:style-name="P9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30" text:outline-level="1" loext:marker-style-name="T4"><text:span text:style-name="T3">一、</text:span><text:span text:style-name="T4">Graph</text:span><text:span text:style-name="T3">（圖）基本概念與圖示</text:span></text:h>
      <text:p text:style-name="P12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"/>
      <text:p text:style-name="P13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3" loext:marker-style-name="T33"><text:span text:style-name="T32">一個頂點連接的邊數。有向圖分</text:span><text:span text:style-name="T55"> </text:span><text:span text:style-name="T59">in-degree</text:span><text:span text:style-name="T55">（進入）</text:span><text:span text:style-name="T32">與 </text:span><text:span text:style-name="T65">out-degree</text:span><text:span text:style-name="T67">（離開）</text:span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DAG</text:span><text:span text:style-name="T9"/></text:p>
          </table:table-cell>
          <table:table-cell table:style-name="表格3.B2" office:value-type="string">
            <text:p text:style-name="P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30" text:outline-level="1" loext:marker-style-name="T4"><text:span text:style-name="T3">二、圖的三種表示法（含完整圖解）</text:span><text:span text:style-name="T4"/></text:h>
      <text:h text:style-name="P32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12" loext:marker-style-name="T33"><text:span text:style-name="T34">把圖</text:span><text:span text:style-name="T75">轉成一張 </text:span><text:span text:style-name="T76">V×V </text:span><text:span text:style-name="T75">的二維表格</text:span><text:span text:style-name="T32">，</text:span><text:span text:style-name="T55">兩點有邊填 </text:span><text:span text:style-name="T59">1</text:span><text:span text:style-name="T55">（或權重）</text:span><text:span text:style-name="T32">，</text:span><text:span text:style-name="T68">無邊填 </text:span><text:span text:style-name="T66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7"><text:span text:style-name="T47"><text:s text:c="2"/>問：為什麼空間是 </text:span><text:span text:style-name="T61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</text:span><text:span text:style-name="T80">矩陣大小</text:span><text:span text:style-name="T47"> = </text:span><text:span text:style-name="T89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96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96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→ </text:span><text:span text:style-name="T69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89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61">全部 V 個頂點都要算 → V × O(V)</text:span><text:span text:style-name="T47"> = O(V²) = O(n²)</text:span></text:p>
          </table:table-cell>
        </table:table-row>
      </table:table>
      <text:h text:style-name="P32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12" loext:marker-style-name="T33"><text:span text:style-name="T75">每個頂點建一條鏈結串列，只記錄「真正存在」的鄰居</text:span><text:span text:style-name="T32">，不存 </text:span><text:span text:style-name="T40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96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81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（這就是 </text:span><text:span text:style-name="T70">Adjacency List 的缺點：同一條邊存兩份</text:span><text:span text:style-name="T47">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① </text:span><text:span text:style-name="T81">V 個頂點的「起始節點」</text:span><text:span text:style-name="T47"> <text:s text:c="6"/>→ </text:span><text:span text:style-name="T61">V 個單元</text:span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② </text:span><text:span text:style-name="T81">每條邊在兩端各存一次</text:span><text:span text:style-name="T93"> </text:span><text:span text:style-name="T47"><text:s text:c="9"/>→ </text:span><text:span text:style-name="T61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61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A 的鄰接串列</text:span><text:span text:style-name="T47">：</text:span><text:span text:style-name="T96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這裡的箭頭</text:span><text:span text:style-name="T77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04">意思是「下一個節點」</text:span><text:span text:style-name="T47">，</text:span><text:span text:style-name="T107">不是圖的邊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96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61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82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105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（</text:span><text:span text:style-name="T61">A 分別連到 B、C、D</text:span><text:span text:style-name="T47">，</text:span><text:span text:style-name="T105">B/C/D 彼此之間沒有邊</text:span><text:span text:style-name="T47">）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7"><text:span text:style-name="T47"><text:s text:c="2"/></text:span><text:span text:style-name="T61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/></text:span><text:span text:style-name="T77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96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82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所以 </text:span><text:span text:style-name="T71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32" text:outline-level="2" loext:marker-style-name="T12"><text:span text:style-name="T12">2-3 Adjacency Multilist</text:span><text:span text:style-name="T13">（相鄰多重串列）</text:span></text:h>
      <text:p text:style-name="P12" loext:marker-style-name="T33"><text:span text:style-name="T32">先記住這一句話：</text:span><text:span text:style-name="T94">Adjacency Multilist</text:span><text:span text:style-name="T40"> = </text:span><text:span text:style-name="T32">為了讓</text:span><text:span text:style-name="T100">「同一條邊只存一次」</text:span><text:span text:style-name="T34">而發明的資料結構</text:span><text:span text:style-name="T32">。</text:span></text:p>
      <text:p text:style-name="P1"/>
      <text:p text:style-name="P13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→ </text:span><text:span text:style-name="T104">3 條邊，卻存了 6 份資料！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69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69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有人就想：</text:span><text:span text:style-name="T61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這樣</text:span><text:span text:style-name="T80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</text:span><text:span text:style-name="T97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→ </text:span><text:span text:style-name="T72">A 和 B 共用同一個 e1</text:span><text:span text:style-name="T47">，不再各自存一份。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7"><text:span text:style-name="T47"><text:s text:c="2"/></text:span><text:span text:style-name="T50">圖形有三條邊</text:span><text:span text:style-name="T47"> → </text:span><text:span text:style-name="T108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五步：</text:span><text:span text:style-name="T57">為什麼需要 </text:span><text:span text:style-name="T60">link1 </text:span><text:span text:style-name="T57">和 </text:span><text:span text:style-name="T60">link2</text:span><text:span text:style-name="T5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7"><text:span text:style-name="T47"><text:s text:c="2"/>問題：</text:span><text:span text:style-name="T77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/></text:span><text:span text:style-name="T84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84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但是 </text:span><text:span text:style-name="T73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104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→ 所以 </text:span><text:span text:style-name="T82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1：</text:span><text:span text:style-name="T61">給 V1（也就是 A）用</text:span><text:span text:style-name="T47">，</text:span><text:span text:style-name="T50">記錄</text:span><text:span text:style-name="T109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2：</text:span><text:span text:style-name="T61">給 V2（也就是 B）用</text:span><text:span text:style-name="T47">，</text:span><text:span text:style-name="T50">記錄</text:span><text:span text:style-name="T78">「B 的下一條邊」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7"><text:span text:style-name="T47"><text:s text:c="2"/>【站在 A 的角度】 </text:span><text:span text:style-name="T96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77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B 的角度】 </text:span><text:span text:style-name="T96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77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C 的角度】 </text:span><text:span text:style-name="T96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3"/></text:span><text:span text:style-name="T77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</text:span><text:span text:style-name="T61">A的下一條</text:span><text:span text:style-name="T47"> <text:s/>↑</text:span><text:span text:style-name="T61">B的下一條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5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6"/></text:span><text:span text:style-name="T85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06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06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2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82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考試申論題標準答案：</text:span><text:span text:style-name="T57">為什麼 </text:span><text:span text:style-name="T60">Edge </text:span><text:span text:style-name="T57">節點需要 </text:span><text:span text:style-name="T60">link1 </text:span><text:span text:style-name="T57">和 </text:span><text:span text:style-name="T60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1 端走訪其所有邊時</text:span><text:span text:style-name="T47">，需要 </text:span><text:span text:style-name="T86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2 端走訪其所有邊時</text:span><text:span text:style-name="T47">，需要 </text:span><text:span text:style-name="T86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</text:span><text:span text:style-name="T50">兩端的「下一條邊」</text:span><text:span text:style-name="T47">通常是</text:span><text:span text:style-name="T77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因此 </text:span><text:span text:style-name="T70">Edge 節點必須同時保存 link1 與 link2 兩個鏈結指標</text:span><text:span text:style-name="T47">。</text:span></text:p>
          </table:table-cell>
        </table:table-row>
      </table:table>
      <text:p text:style-name="P1"/>
      <text:p text:style-name="P13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61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96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84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需要看 n² 個格子 → </text:span><text:span text:style-name="T77">O(n²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96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84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48">檢查所有 e 條邊</text:span><text:span text:style-name="T80">（每條邊會從兩端各被看到一次）</text:span><text:span text:style-name="T82">→ 2e 步</text:span></text:p>
          </table:table-cell>
        </table:table-row>
        <table:table-row table:style-name="表格20.1">
          <table:table-cell table:style-name="表格20.A10" office:value-type="string">
            <text:p text:style-name="P2" loext:marker-style-name="T47"><text:span text:style-name="T47"><text:s text:c="4"/></text:span><text:span text:style-name="T112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總計 </text:span><text:span text:style-name="T77">n + 2e = O(n+e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32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3" loext:marker-style-name="T114"><text:span text:style-name="T113">比較項目</text:span><text:span text:style-name="T114"/></text:p>
          </table:table-cell>
          <table:table-cell table:style-name="表格21.A1" office:value-type="string">
            <text:p text:style-name="P10" loext:marker-style-name="T114"><text:span text:style-name="T117">Adjacency Matrix</text:span><text:span text:style-name="T114"/></text:p>
          </table:table-cell>
          <table:table-cell table:style-name="表格21.A1" office:value-type="string">
            <text:p text:style-name="P10" loext:marker-style-name="T114"><text:span text:style-name="T117">Adjacency List</text:span><text:span text:style-name="T114"/></text:p>
          </table:table-cell>
          <table:table-cell table:style-name="表格21.A1" office:value-type="string">
            <text:p text:style-name="P10" loext:marker-style-name="T114"><text:span text:style-name="T117">Adjacency Multilist</text:span><text:span text:style-name="T114"/></text:p>
          </table:table-cell>
          <table:table-cell table:style-name="表格21.A1" office:value-type="string">
            <text:p text:style-name="P3" loext:marker-style-name="T114"><text:span text:style-name="T113">備註</text:span><text:span text:style-name="T114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10" loext:marker-style-name="T119"><text:span text:style-name="T118">O(V²)</text:span><text:span text:style-name="T119"/></text:p>
          </table:table-cell>
          <table:table-cell table:style-name="表格21.C2" office:value-type="string">
            <text:p text:style-name="P10" loext:marker-style-name="T125"><text:span text:style-name="T123">O(V+E)</text:span><text:span text:style-name="T125"/></text:p>
          </table:table-cell>
          <table:table-cell table:style-name="表格21.C2" office:value-type="string">
            <text:p text:style-name="P10" loext:marker-style-name="T125"><text:span text:style-name="T123">O(V+E)</text:span><text:span text:style-name="T125"/></text:p>
          </table:table-cell>
          <table:table-cell table:style-name="表格21.E2" office:value-type="string">
            <text:p text:style-name="P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10" loext:marker-style-name="T125"><text:span text:style-name="T123">O(1)</text:span><text:span text:style-name="T125"/></text:p>
          </table:table-cell>
          <table:table-cell table:style-name="表格21.B2" office:value-type="string">
            <text:p text:style-name="P10" loext:marker-style-name="T119"><text:span text:style-name="T118">O(degree)</text:span><text:span text:style-name="T119"/></text:p>
          </table:table-cell>
          <table:table-cell table:style-name="表格21.B2" office:value-type="string">
            <text:p text:style-name="P10" loext:marker-style-name="T119"><text:span text:style-name="T118">O(degree)</text:span><text:span text:style-name="T119"/></text:p>
          </table:table-cell>
          <table:table-cell table:style-name="表格21.E2" office:value-type="string">
            <text:p text:style-name="P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10" loext:marker-style-name="T119"><text:span text:style-name="T118">O(n²)</text:span><text:span text:style-name="T119"/></text:p>
          </table:table-cell>
          <table:table-cell table:style-name="表格21.C2" office:value-type="string">
            <text:p text:style-name="P10" loext:marker-style-name="T125"><text:span text:style-name="T123">O(n+e)</text:span><text:span text:style-name="T125"/></text:p>
          </table:table-cell>
          <table:table-cell table:style-name="表格21.C2" office:value-type="string">
            <text:p text:style-name="P10" loext:marker-style-name="T125"><text:span text:style-name="T123">O(n+e)</text:span><text:span text:style-name="T125"/></text:p>
          </table:table-cell>
          <table:table-cell table:style-name="表格21.A2" office:value-type="string">
            <text:p text:style-name="P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10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10" loext:marker-style-name="T121"><text:span text:style-name="T120">存兩次（無向）</text:span><text:span text:style-name="T121"/></text:p>
          </table:table-cell>
          <table:table-cell table:style-name="表格21.C2" office:value-type="string">
            <text:p text:style-name="P10" loext:marker-style-name="T56"><text:span text:style-name="T55">只存一次 ✓</text:span><text:span text:style-name="T56"/></text:p>
          </table:table-cell>
          <table:table-cell table:style-name="表格21.E2" office:value-type="string">
            <text:p text:style-name="P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10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3"/>
          </table:table-cell>
        </table:table-row>
      </table:table>
      <text:p text:style-name="Standard"/>
      <text:h text:style-name="P30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12" loext:marker-style-name="T33"><text:span text:style-name="T42">Breadth-First</text:span><text:span text:style-name="T40"> Search</text:span><text:span text:style-name="T32">｜使用 </text:span><text:span text:style-name="T40">Queue</text:span><text:span text:style-name="T32">（</text:span><text:span text:style-name="T40">FIFO </text:span><text:span text:style-name="T32">佇列）</text:span></text:p>
      <text:p text:style-name="P1"/>
      <text:h text:style-name="P32" text:outline-level="2" loext:marker-style-name="T12"><text:span text:style-name="T12">3-1 </text:span><text:span text:style-name="T13">核心概念圖解</text:span></text:h>
      <text:p text:style-name="P13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3-2 BFS </text:span><text:span text:style-name="T13">逐步追蹤（詳細步驟）</text:span></text:h>
      <text:p text:style-name="P13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/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從 A 開始 BFS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0" loext:marker-style-name="T114"><text:span text:style-name="T113">步</text:span><text:span text:style-name="T114"/></text:p>
          </table:table-cell>
          <table:table-cell table:style-name="表格24.A1" office:value-type="string">
            <text:p text:style-name="P3" loext:marker-style-name="T114"><text:span text:style-name="T113">動作</text:span><text:span text:style-name="T114"/></text:p>
          </table:table-cell>
          <table:table-cell table:style-name="表格24.A1" office:value-type="string">
            <text:p text:style-name="P10" loext:marker-style-name="T114"><text:span text:style-name="T117">Queue </text:span><text:span text:style-name="T113">狀態（左</text:span><text:span text:style-name="T117">=</text:span><text:span text:style-name="T113">隊首）</text:span></text:p>
          </table:table-cell>
          <table:table-cell table:style-name="表格24.A1" office:value-type="string">
            <text:p text:style-name="P10" loext:marker-style-name="T114"><text:span text:style-name="T113">已拜訪</text:span><text:span text:style-name="T114"/></text:p>
          </table:table-cell>
          <table:table-cell table:style-name="表格24.A1" office:value-type="string">
            <text:p text:style-name="P10" loext:marker-style-name="T114"><text:span text:style-name="T113">輸出</text:span><text:span text:style-name="T114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}</text:span><text:span text:style-name="T33"/></text:p>
          </table:table-cell>
          <table:table-cell table:style-name="表格24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①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10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10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③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10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10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⑤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125"><text:span text:style-name="T123">A B C D E</text:span><text:span text:style-name="T125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3-3 B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60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1">每個頂點最多被 enqueue / dequeue 一次</text:span><text:span text:style-name="T47"> <text:s/>→ </text:span><text:span text:style-name="T110">O(V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77">每條邊在處理時最多被檢查兩次（兩端各一）</text:span><text:span text:style-name="T47">→ </text:span><text:span text:style-name="T111">O(E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總計：</text:span><text:span text:style-name="T61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2"/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範例：</text:span><text:span text:style-name="T50">V=5，E=4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2">時間複雜度與 V+E 成正比</text:span><text:span text:style-name="T47">，此圖規模為 O(5+4) = O(9) （非常有效率）</text:span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60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71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91">最壞情況下</text:span><text:span text:style-name="T47">，</text:span><text:span text:style-name="T70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（例如</text:span><text:span text:style-name="T50">星形圖中</text:span><text:span text:style-name="T47">，</text:span><text:span text:style-name="T77">處理中心頂點後，其餘 V−1 個頂點同時進入 Queue</text:span><text:span text:style-name="T47">）</text:span></text:p>
          </table:table-cell>
        </table:table-row>
        <table:table-row table:style-name="表格27.1">
          <table:table-cell table:style-name="表格27.A1" office:value-type="string">
            <text:p text:style-name="P4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因此 </text:span><text:span text:style-name="T50">Queue 所需空間為</text:span><text:span text:style-name="T47"> </text:span><text:span text:style-name="T110">O(V)</text:span><text:span text:style-name="T47">。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另需 <text:span text:style-name="T138">visited 陣列記錄已拜訪頂點</text:span> → <text:span text:style-name="T74">O(V)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/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88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88">O(V)+O(V)=O(V)</text:span></text:p>
          </table:table-cell>
        </table:table-row>
      </table:table>
      <text:p text:style-name="P17" loext:marker-style-name="T128"><text:span text:style-name="T128"><text:s text:c="2"/>▎ ⚠ 重要前提：</text:span><text:span text:style-name="T58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8" loext:marker-style-name="T134"><text:span text:style-name="T129"><text:s text:c="2"/>上述 </text:span><text:span text:style-name="T85">BFS / DFS 的 O(V+E)是建立在 Graph 採用 Adjacency List或 Adjacency Multilist 儲存的情況下</text:span><text:span text:style-name="T129">。</text:span></text:p>
            <text:p text:style-name="P18" loext:marker-style-name="T134"><text:span text:style-name="T129"><text:s text:c="2"/>若 Graph 採用 Adjacency Matrix，</text:span><text:span text:style-name="T77">若使用 Adjacency Matrix</text:span><text:span text:style-name="T134">，每處理一個頂點需掃描整列（O(V)）找鄰居，共 V 個頂點 × O(V) = O(V²)，</text:span><text:span text:style-name="T77">時間複雜度為 O(V²)，而非 O(V+E)</text:span><text:span text:style-name="T134">。</text:span></text:p>
            <text:p text:style-name="P19" loext:marker-style-name="T129"><text:span text:style-name="T129"/></text:p>
            <text:p text:style-name="P19" loext:marker-style-name="T129"><text:span text:style-name="T129">【一句話結論】</text:span></text:p>
            <text:p text:style-name="P19" loext:marker-style-name="T129"><text:span text:style-name="T90">BFS 的 O(V+E) 成立，是因為 Graph 採用 Adjacency List</text:span><text:span text:style-name="T129">（或 Adjacency Multilist）</text:span><text:span text:style-name="T90">儲存</text:span><text:span text:style-name="T129">的前下，</text:span><text:span text:style-name="T98">BFS 的執行過程幾乎等同於「依序</text:span><text:span text:style-name="T87">掃描每個頂點的 Adjacency List 一遍</text:span><text:span text:style-name="T98">」</text:span><text:span text:style-name="T129">。</text:span></text:p>
          </table:table-cell>
        </table:table-row>
      </table:table>
      <text:p text:style-name="Standard"/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27"><text:span text:style-name="T146">BFS</text:span> 是<text:span text:style-name="T95">「演算法」（圖怎麼走）</text:span></text:p>
            <text:p text:style-name="P28"><text:span text:style-name="T148">Adjacency List</text:span> 是<text:span text:style-name="T79">「儲存方式」（圖怎麼存）</text:span></text:p>
            <text:p text:style-name="P21">兩者概念不同，但在實作上緊密結合。</text:p>
            <text:p text:style-name="P6"/>
            <text:p text:style-name="P21">BFS 虛擬碼：</text:p>
            <text:p text:style-name="P6"/>
            <text:p text:style-name="P21"><text:s text:c="2"/>while (<text:span text:style-name="T150">!Q.empty()</text:span>) {</text:p>
            <text:p text:style-name="P21"><text:s text:c="5"/><text:span text:style-name="T150"><text:s/>u = Q.front()</text:span>;</text:p>
            <text:p text:style-name="P6"><text:soft-page-break/><text:span text:style-name="T143"><text:s text:c="5"/></text:span><text:span text:style-name="T145"><text:s/>Q.pop()</text:span><text:span text:style-name="T143">;</text:span></text:p>
            <text:p text:style-name="P21"><text:s text:c="6"/>for (<text:span text:style-name="T139">each neighbor v of u</text:span>) { <text:s text:c="2"/>← 這一行！</text:p>
            <text:p text:style-name="P21"><text:s text:c="10"/>if (<text:span text:style-name="T140">!visited[v]</text:span>) {</text:p>
            <text:p text:style-name="P21"><text:s text:c="14"/>visited[v] = true;</text:p>
            <text:p text:style-name="P21"><text:s text:c="14"/><text:span text:style-name="T142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6"/>
            <text:p text:style-name="P21"><text:span text:style-name="T141">「for (each neighbor v of u)」實際上就是</text:span>：</text:p>
            <text:p text:style-name="P21">→ <text:span text:style-name="T64">掃描 u 的 Adjacency List 中每一個鄰居節點</text:span></text:p>
            <text:p text:style-name="P6"/>
            <text:p text:style-name="P21">因此，<text:span text:style-name="T103">BFS 的整體執行過程</text:span> =</text:p>
            <text:p text:style-name="P29">Queue（管理拜訪順序）+ 不停掃描各頂點的 Adjacency List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20">▎ 用<text:span text:style-name="T150">同一張圖</text:span>，<text:span text:style-name="T63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6"/>
            <text:p text:style-name="P21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6"/>
            <text:p text:style-name="P21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6"/>
            <text:p text:style-name="P21">觀察：BFS 執行一遍，恰好把 A、B、C、D、E 的 Adjacency List</text:p>
            <text:p text:style-name="P21">全部從頭到尾各掃描了一次！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0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每個頂點最多進出 Queue 一次</text:p>
            <text:p text:style-name="P21"><text:s text:c="2"/>→ 共 V 個頂點 → O(V)</text:p>
            <text:p text:style-name="P6"/>
            <text:p text:style-name="P21">O(E) 的來源（本質！）：</text:p>
            <text:p text:style-name="P21"><text:s text:c="2"/>所有 Adjacency List 中的鄰居節點，加起來總共有 2E 個</text:p>
            <text:p text:style-name="P21"><text:s text:c="2"/>（每條邊出現在兩個頂點的串列各一次）</text:p>
            <text:p text:style-name="P21"><text:s text:c="2"/>BFS 把它們全部掃描了一遍 → O(2E) = O(E)</text:p>
            <text:p text:style-name="P6"/>
            <text:p text:style-name="P21">合計：O(V) + O(E) = O(V + E)</text:p>
            <text:p text:style-name="P6"/>
            <text:p text:style-name="P21">口訣：</text:p>
            <text:p text:style-name="P21">O(V) = 每個頂點進出 Queue 一次</text:p>
            <text:p text:style-name="P21">O(E) = 所有 Adjacency List 被掃描一遍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6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6"><text:soft-page-break/><text:span text:style-name="T143"><text:s text:c="2"/>D[ 0 <text:s/>1 <text:s/>0 <text:s/>0 ]</text:span></text:p>
            <text:p text:style-name="P6"/>
            <text:p text:style-name="P21">BFS 處理頂點 A 時，不再是走一條短短的 Adjacency List，</text:p>
            <text:p text:style-name="P21">而是必須掃描矩陣整列：</text:p>
            <text:p text:style-name="P6"/>
            <text:p text:style-name="P21"><text:s text:c="2"/>matrix[A][0] → matrix[A][1] → matrix[A][2] → matrix[A][3]</text:p>
            <text:p text:style-name="P6"/>
            <text:p text:style-name="P21">無論這一列有幾個 1，都要掃完整的 V 格 → O(V)</text:p>
            <text:p text:style-name="P6"/>
            <text:p text:style-name="P21">V 個頂點都這樣做：V × O(V) = O(V²)</text:p>
            <text:p text:style-name="P6"/>
            <text:p text:style-name="P21">這就是為什麼改用 Matrix，BFS 時間就從 O(V+E) 變成 O(V²)。</text:p>
          </table:table-cell>
        </table:table-row>
      </table:table>
      <text:p text:style-name="P5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20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2">表示法</text:p>
          </table:table-cell>
          <table:table-cell table:style-name="表格58.A2" office:value-type="string">
            <text:p text:style-name="P22">BFS 時間</text:p>
          </table:table-cell>
          <table:table-cell table:style-name="表格58.A2" office:value-type="string">
            <text:p text:style-name="P22">DFS 時間</text:p>
          </table:table-cell>
          <table:table-cell table:style-name="表格58.A2" office:value-type="string">
            <text:p text:style-name="P22">原因</text:p>
          </table:table-cell>
        </table:table-row>
        <table:table-row table:style-name="表格58.1">
          <table:table-cell table:style-name="表格58.A3" office:value-type="string">
            <text:p text:style-name="P23">Adjacency Matrix</text:p>
          </table:table-cell>
          <table:table-cell table:style-name="表格58.A3" office:value-type="string">
            <text:p text:style-name="P23">O(V²)</text:p>
          </table:table-cell>
          <table:table-cell table:style-name="表格58.A3" office:value-type="string">
            <text:p text:style-name="P23">O(V²)</text:p>
          </table:table-cell>
          <table:table-cell table:style-name="表格58.A3" office:value-type="string">
            <text:p text:style-name="P23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3">Adjacency List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3">Adjacency Multilist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O(V+E)</text:p>
          </table:table-cell>
          <table:table-cell table:style-name="表格58.A3" office:value-type="string">
            <text:p text:style-name="P23">同 List，邊節點只存一份但邏輯等價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「BFS 時間複雜度 O(V+E)」，</text:p>
            <text:p text:style-name="P21"><text:s text:c="3"/>預設前提是 Graph 採用 Adjacency List 或 Adjacency Multilist 儲存。</text:p>
            <text:p text:style-name="P21"><text:s text:c="3"/>若題目明確說明使用 Adjacency Matrix，則答案改為 O(V²)。</text:p>
            <text:p text:style-name="P21"><text:s text:c="3"/>兩種情況都是公職考試常出現的細節，務必區分！</text:p>
          </table:table-cell>
        </table:table-row>
      </table:table>
      <text:p text:style-name="P5"/>
      <text:h text:style-name="P30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12" loext:marker-style-name="T33"><text:span text:style-name="T40">Depth-First Search</text:span><text:span text:style-name="T32">｜使用 </text:span><text:span text:style-name="T40">Stack</text:span><text:span text:style-name="T32">（</text:span><text:span text:style-name="T40">LIFO </text:span><text:span text:style-name="T32">堆疊）</text:span></text:p>
      <text:p text:style-name="P1"/>
      <text:h text:style-name="P32" text:outline-level="2" loext:marker-style-name="T12"><text:span text:style-name="T12">4-1 </text:span><text:span text:style-name="T13">核心概念圖解</text:span></text:h>
      <text:p text:style-name="P13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13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0" loext:marker-style-name="T114"><text:span text:style-name="T113">步</text:span><text:span text:style-name="T114"/></text:p>
          </table:table-cell>
          <table:table-cell table:style-name="表格30.A1" office:value-type="string">
            <text:p text:style-name="P3" loext:marker-style-name="T114"><text:span text:style-name="T113">動作</text:span><text:span text:style-name="T114"/></text:p>
          </table:table-cell>
          <table:table-cell table:style-name="表格30.A1" office:value-type="string">
            <text:p text:style-name="P10" loext:marker-style-name="T114"><text:span text:style-name="T117">Stack </text:span><text:span text:style-name="T113">狀態（右</text:span><text:span text:style-name="T117">=</text:span><text:span text:style-name="T113">頂端）</text:span></text:p>
          </table:table-cell>
          <table:table-cell table:style-name="表格30.A1" office:value-type="string">
            <text:p text:style-name="P10" loext:marker-style-name="T114"><text:span text:style-name="T113">已拜訪</text:span><text:span text:style-name="T114"/></text:p>
          </table:table-cell>
          <table:table-cell table:style-name="表格30.A1" office:value-type="string">
            <text:p text:style-name="P10" loext:marker-style-name="T114"><text:span text:style-name="T113">輸出</text:span><text:span text:style-name="T114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}</text:span><text:span text:style-name="T33"/></text:p>
          </table:table-cell>
          <table:table-cell table:style-name="表格3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10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10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10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125"><text:span text:style-name="T123">A B D E C</text:span><text:span text:style-name="T125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4-3 D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→ O(V)</text:span><text:span text:style-name="T47"/></text:p>
          </table:table-cell>
        </table:table-row>
      </table:table>
      <text:p text:style-name="P17" loext:marker-style-name="T128"><text:span text:style-name="T128"><text:s text:c="2"/>▎ ⚠ 重要前提：O(V+E) 成立的條件（同 BFS）</text:span><text:span text:style-name="T128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8" loext:marker-style-name="T129"><text:span text:style-name="T129"><text:s text:c="2"/>DFS 的 O(V+E) 同樣以 Adjacency List 或 Multilist 為前提。</text:span><text:span text:style-name="T129"/></text:p>
            <text:p text:style-name="P2" loext:marker-style-name="T134"><text:span text:style-name="T134"><text:s text:c="2"/>改用 Adjacency Matrix 時，每個頂點需掃描完整的一列才能找到所有鄰居，</text:span><text:span text:style-name="T134"/></text:p>
            <text:p text:style-name="P24" loext:marker-style-name="T134"><text:span text:style-name="T134"><text:s text:c="2"/>共 V 個頂點 × O(V) = O(V²)。這是公職考試常考的細節，務必記住！</text:span><text:span text:style-name="T134"/></text:p>
          </table:table-cell>
        </table:table-row>
      </table:table>
      <text:h text:style-name="P32" text:outline-level="2" loext:marker-style-name="T12"><text:span text:style-name="T12">4-4 BFS vs DFS </text:span><text:span text:style-name="T13">核心差異</text:span></text:h>
      <text:p text:style-name="P13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3" loext:marker-style-name="T114"><text:span text:style-name="T113">項目</text:span><text:span text:style-name="T114"/></text:p>
          </table:table-cell>
          <table:table-cell table:style-name="表格36.A1" office:value-type="string">
            <text:p text:style-name="P10" loext:marker-style-name="T114"><text:span text:style-name="T117">BFS</text:span><text:span text:style-name="T113">（廣度優先）</text:span></text:p>
          </table:table-cell>
          <table:table-cell table:style-name="表格36.A1" office:value-type="string">
            <text:p text:style-name="P10" loext:marker-style-name="T114"><text:span text:style-name="T117">DFS</text:span><text:span text:style-name="T113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10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10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10" loext:marker-style-name="T136"><text:span text:style-name="T135">B → Q</text:span><text:span text:style-name="T136"/></text:p>
          </table:table-cell>
          <table:table-cell table:style-name="表格36.B3" office:value-type="string">
            <text:p text:style-name="P10" loext:marker-style-name="T136"><text:span text:style-name="T135">D → S</text:span><text:span text:style-name="T136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10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10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10" loext:marker-style-name="T127"><text:span text:style-name="T124">O(V+E)</text:span><text:span text:style-name="T127"/></text:p>
          </table:table-cell>
          <table:table-cell table:style-name="表格36.B5" office:value-type="string">
            <text:p text:style-name="P10" loext:marker-style-name="T127"><text:span text:style-name="T124">O(V+E)</text:span><text:span text:style-name="T127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</table:table-row>
      </table:table>
      <text:p text:style-name="Standard"/>
      <text:h text:style-name="P30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"/>
      <text:h text:style-name="P32" text:outline-level="2" loext:marker-style-name="T12"><text:span text:style-name="T12">5-1 </text:span><text:span text:style-name="T13">什麼是拓樸排序？</text:span></text:h>
      <text:p text:style-name="P13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5-2 In-degree </text:span><text:span text:style-name="T13">圖解</text:span></text:h>
      <text:p text:style-name="P13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5-3 Kahn's Algorithm </text:span><text:span text:style-name="T13">逐步圖解</text:span></text:h>
      <text:p text:style-name="P13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10" loext:marker-style-name="T114"><text:span text:style-name="T113">步</text:span><text:span text:style-name="T114"/></text:p>
          </table:table-cell>
          <table:table-cell table:style-name="表格40.A1" office:value-type="string">
            <text:p text:style-name="P3" loext:marker-style-name="T114"><text:span text:style-name="T113">動作</text:span><text:span text:style-name="T114"/></text:p>
          </table:table-cell>
          <table:table-cell table:style-name="表格40.A1" office:value-type="string">
            <text:p text:style-name="P10" loext:marker-style-name="T114"><text:span text:style-name="T113">各頂點 </text:span><text:span text:style-name="T117">in-degree</text:span></text:p>
          </table:table-cell>
          <table:table-cell table:style-name="表格40.A1" office:value-type="string">
            <text:p text:style-name="P10" loext:marker-style-name="T114"><text:span text:style-name="T117">Queue</text:span><text:span text:style-name="T114"/></text:p>
          </table:table-cell>
          <table:table-cell table:style-name="表格40.A1" office:value-type="string">
            <text:p text:style-name="P10" loext:marker-style-name="T114"><text:span text:style-name="T113">輸出</text:span><text:span text:style-name="T114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10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10" loext:marker-style-name="T125"><text:span text:style-name="T123">M S L P ML</text:span><text:span text:style-name="T125"/></text:p>
          </table:table-cell>
        </table:table-row>
      </table:table>
      <text:p text:style-name="P1"/>
      <text:h text:style-name="P32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30" text:outline-level="1" loext:marker-style-name="T4"><text:span text:style-name="T3">六、</text:span><text:span text:style-name="T4">Prim </text:span><text:span text:style-name="T3">演算法（</text:span><text:span text:style-name="T4">MST</text:span><text:span text:style-name="T3">）─ 含完整圖解</text:span></text:h>
      <text:p text:style-name="P1"/>
      <text:h text:style-name="P32" text:outline-level="2" loext:marker-style-name="T12"><text:span text:style-name="T12">6-1 MST </text:span><text:span text:style-name="T13">是什麼？圖解說明</text:span></text:h>
      <text:p text:style-name="P13" loext:marker-style-name="T7"><text:span text:style-name="T16"><text:s text:c="2"/>▎ </text:span><text:span text:style-name="T6">問題：如何用最少成本把所有城市接通網路？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" loext:marker-style-name="T47"><text:span text:style-name="T47"><text:s text:c="2"/>圖形（V={T,W,X,Y,Z}）：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\ <text:s text:c="3"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1 7 <text:s text:c="2"/>3 <text:s text:c="4"/>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 <text:s/>\ <text:s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Y <text:s text:c="2"/>──Z─────┘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所有邊：(T,W)=2 <text:s/>(T,Y)=1 <text:s/>(T,Z)=7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9"/>(W,X)=4 <text:s/>(W,Z)=3 <text:s/>(X,Z)=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目標：選最少成本的 V-1=4 條邊，讓所有頂點相連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8"/>且不能形成 Cycle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6-2 Prim </text:span><text:span text:style-name="T13">演算法逐步圖解（從 </text:span><text:span text:style-name="T12">X </text:span><text:span text:style-name="T13">出發）</text:span></text:h>
      <text:p text:style-name="P13" loext:marker-style-name="T7"><text:span text:style-name="T16"><text:s text:c="2"/>▎ </text:span><text:span text:style-name="T6">每一步選「連接樹與非樹頂點之間，最短的邊」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10" loext:marker-style-name="T114"><text:span text:style-name="T113">步</text:span><text:span text:style-name="T114"/></text:p>
          </table:table-cell>
          <table:table-cell table:style-name="表格44.A1" office:value-type="string">
            <text:p text:style-name="P3" loext:marker-style-name="T114"><text:span text:style-name="T113">候選邊（樹 ↔ 非樹）</text:span><text:span text:style-name="T114"/></text:p>
          </table:table-cell>
          <table:table-cell table:style-name="表格44.A1" office:value-type="string">
            <text:p text:style-name="P3" loext:marker-style-name="T114"><text:span text:style-name="T113">選擇（最小）</text:span><text:span text:style-name="T114"/></text:p>
          </table:table-cell>
          <table:table-cell table:style-name="表格44.A1" office:value-type="string">
            <text:p text:style-name="P10" loext:marker-style-name="T114"><text:span text:style-name="T113">目前樹</text:span><text:span text:style-name="T114"/></text:p>
          </table:table-cell>
          <table:table-cell table:style-name="表格44.A1" office:value-type="string">
            <text:p text:style-name="P10" loext:marker-style-name="T114"><text:span text:style-name="T113">累計</text:span><text:span text:style-name="T114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3">出發</text:span><text:span text:style-name="T24"/></text:p>
          </table:table-cell>
          <table:table-cell table:style-name="表格44.B2" office:value-type="string">
            <text:p text:style-name="P3" loext:marker-style-name="T33"><text:span text:style-name="T32">樹</text:span><text:span text:style-name="T40">={X} <text:s/></text:span><text:span text:style-name="T32">非樹</text:span><text:span text:style-name="T40">={T,W,Y,Z}</text:span></text:p>
          </table:table-cell>
          <table:table-cell table:style-name="表格44.B2" office:value-type="string">
            <text:p text:style-name="P3" loext:marker-style-name="T33"><text:span text:style-name="T32">選起點 </text:span><text:span text:style-name="T40">X</text:span><text:span text:style-name="T32">，加入樹</text:span></text:p>
          </table:table-cell>
          <table:table-cell table:style-name="表格44.B2" office:value-type="string">
            <text:p text:style-name="P10" loext:marker-style-name="T33"><text:span text:style-name="T40">{X}</text:span><text:span text:style-name="T33"/></text:p>
          </table:table-cell>
          <table:table-cell table:style-name="表格44.B2" office:value-type="string">
            <text:p text:style-name="P10" loext:marker-style-name="T33"><text:span text:style-name="T40">0</text:span><text:span text:style-name="T33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①</text:span><text:span text:style-name="T24"/></text:p>
          </table:table-cell>
          <table:table-cell table:style-name="表格44.B3" office:value-type="string">
            <text:p text:style-name="P3" loext:marker-style-name="T33"><text:span text:style-name="T40">(X,W)=4 <text:s/>← </text:span><text:span text:style-name="T32">最小 </text:span><text:span text:style-name="T40">(X,Z)=6</text:span></text:p>
          </table:table-cell>
          <table:table-cell table:style-name="表格44.C3" office:value-type="string">
            <text:p text:style-name="P3" loext:marker-style-name="T125"><text:span text:style-name="T126">選 </text:span><text:span text:style-name="T123">(X,W)=4 </text:span><text:span text:style-name="T126">加入 </text:span><text:span text:style-name="T123">W</text:span></text:p>
          </table:table-cell>
          <table:table-cell table:style-name="表格44.B3" office:value-type="string">
            <text:p text:style-name="P10" loext:marker-style-name="T33"><text:span text:style-name="T40">{X,W}</text:span><text:span text:style-name="T33"/></text:p>
          </table:table-cell>
          <table:table-cell table:style-name="表格44.B3" office:value-type="string">
            <text:p text:style-name="P10" loext:marker-style-name="T125"><text:span text:style-name="T123">4</text:span><text:span text:style-name="T125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T)=2 <text:s/>← </text:span><text:span text:style-name="T32">最小 </text:span><text:span text:style-name="T40">(W,Z)=3 (X,Z)=6</text:span></text:p>
          </table:table-cell>
          <table:table-cell table:style-name="表格44.C3" office:value-type="string">
            <text:p text:style-name="P3" loext:marker-style-name="T125"><text:span text:style-name="T126">選 </text:span><text:span text:style-name="T123">(W,T)=2 </text:span><text:span text:style-name="T126">加入 </text:span><text:span text:style-name="T123">T</text:span></text:p>
          </table:table-cell>
          <table:table-cell table:style-name="表格44.B2" office:value-type="string">
            <text:p text:style-name="P10" loext:marker-style-name="T33"><text:span text:style-name="T40">{X,W,T}</text:span><text:span text:style-name="T33"/></text:p>
          </table:table-cell>
          <table:table-cell table:style-name="表格44.B2" office:value-type="string">
            <text:p text:style-name="P10" loext:marker-style-name="T125"><text:span text:style-name="T123">4+2=6</text:span><text:span text:style-name="T125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③</text:span><text:span text:style-name="T24"/></text:p>
          </table:table-cell>
          <table:table-cell table:style-name="表格44.B3" office:value-type="string">
            <text:p text:style-name="P3" loext:marker-style-name="T33"><text:span text:style-name="T40">(T,Y)=1 <text:s/>← </text:span><text:span text:style-name="T32">最小 </text:span><text:span text:style-name="T40">(W,Z)=3 (X,Z)=6 (T,Z)=7</text:span></text:p>
          </table:table-cell>
          <table:table-cell table:style-name="表格44.C3" office:value-type="string">
            <text:p text:style-name="P3" loext:marker-style-name="T125"><text:span text:style-name="T126">選 </text:span><text:span text:style-name="T123">(T,Y)=1 </text:span><text:span text:style-name="T126">加入 </text:span><text:span text:style-name="T123">Y</text:span></text:p>
          </table:table-cell>
          <table:table-cell table:style-name="表格44.B3" office:value-type="string">
            <text:p text:style-name="P10" loext:marker-style-name="T33"><text:span text:style-name="T40">{X,W,T,Y}</text:span><text:span text:style-name="T33"/></text:p>
          </table:table-cell>
          <table:table-cell table:style-name="表格44.B3" office:value-type="string">
            <text:p text:style-name="P10" loext:marker-style-name="T125"><text:span text:style-name="T123">6+1=7</text:span><text:span text:style-name="T125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Z)=3 <text:s/>← </text:span><text:span text:style-name="T32">最小 </text:span><text:span text:style-name="T40">(X,Z)=6 (T,Z)=7</text:span></text:p>
          </table:table-cell>
          <table:table-cell table:style-name="表格44.C3" office:value-type="string">
            <text:p text:style-name="P3" loext:marker-style-name="T125"><text:span text:style-name="T126">選 </text:span><text:span text:style-name="T123">(W,Z)=3 </text:span><text:span text:style-name="T126">加入 </text:span><text:span text:style-name="T123">Z</text:span><text:span text:style-name="T126">（完成！）</text:span></text:p>
          </table:table-cell>
          <table:table-cell table:style-name="表格44.B2" office:value-type="string">
            <text:p text:style-name="P10" loext:marker-style-name="T33"><text:span text:style-name="T40">{X,W,T,Y,Z}</text:span><text:span text:style-name="T33"/></text:p>
          </table:table-cell>
          <table:table-cell table:style-name="表格44.E6" office:value-type="string">
            <text:p text:style-name="P10" loext:marker-style-name="T136"><text:span text:style-name="T135">7+3=10★</text:span><text:span text:style-name="T136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最終 </text:span><text:span text:style-name="T16">MST </text:span><text:span text:style-name="T6">圖示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" loext:marker-style-name="T47"><text:span text:style-name="T47"><text:s text:c="2"/>MST 結果（選出的 4 條邊）：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1 <text:s text:c="4"/>3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Y <text:s text:c="4"/>Z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選出：X-W(4) <text:s/>W-T(2) <text:s/>T-Y(1) <text:s/>W-Z(3)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總權重 = 4 + 2 + 1 + 3 = 10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未選：T-Z(7) <text:s/>X-Z(6) <text:s/>← 加入會形成 Cycle 或不是最小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6-3 Prim </text:span><text:span text:style-name="T13">時間複雜度推導</text:span></text:h>
      <text:p text:style-name="P13" loext:marker-style-name="T7"><text:span text:style-name="T16"><text:s text:c="2"/>▎ </text:span><text:span text:style-name="T6">使用相鄰矩陣：</text:span><text:span text:style-name="T16">O(V²)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" loext:marker-style-name="T47"><text:span text:style-name="T47"><text:s text:c="2"/>Prim 的核心操作：</text:span><text:span text:style-name="T47"/></text:p>
          </table:table-cell>
        </table:table-row>
        <text:soft-page-break/>
        <table:table-row table:style-name="表格46.1">
          <table:table-cell table:style-name="表格46.A1" office:value-type="string">
            <text:p text:style-name="P2" loext:marker-style-name="T47"><text:span text:style-name="T47"><text:s text:c="2"/>每一輪從「候選邊」中找最小的一條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使用矩陣的做法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維護一個 dist[] 陣列，dist[v] = 目前連接 v 到樹的最小邊權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① 掃描所有 V 個頂點，找 dist 最小的 <text:s/>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② 更新鄰居的 dist <text:s text:c="19"/>→ 掃描矩陣第 u 列 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總共執行 V 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V 輪 × O(V) = O(V²)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使用 </text:span><text:span text:style-name="T16">Binary Heap</text:span><text:span text:style-name="T6">（最小堆）：</text:span><text:span text:style-name="T16">O(E log V)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" loext:marker-style-name="T47"><text:span text:style-name="T47"><text:s text:c="2"/>改用 Priority Queue（最小堆）儲存候選邊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① 從堆中取出最小邊（extract-min） <text:s/>→ O(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② 將新加入頂點的鄰居邊加入堆 <text:s text:c="6"/>→ O(log V) 每條邊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條邊最多被加入堆一次 → 共 E 次 O(log V) 操作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總計：O(E 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比較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稠密圖（E ≈ V²）：O(E log V) = O(V² log V) &gt; O(V²) → 矩陣更好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稀疏圖（E ≈ V） ：O(E log V) = O(V log V) <text:s/>&lt; O(V²) → 堆更好</text:span><text:span text:style-name="T47"/></text:p>
          </table:table-cell>
        </table:table-row>
      </table:table>
      <text:p text:style-name="Standard"/>
      <text:h text:style-name="P30" text:outline-level="1" loext:marker-style-name="T4"><text:span text:style-name="T3">七、</text:span><text:span text:style-name="T4">Adjacency Multilist </text:span><text:span text:style-name="T3">深度解析（含完整圖解）</text:span></text:h>
      <text:p text:style-name="P1"/>
      <text:h text:style-name="P32" text:outline-level="2" loext:marker-style-name="T12"><text:span text:style-name="T12">7-1 </text:span><text:span text:style-name="T13">問題：為什麼 </text:span><text:span text:style-name="T12">Adjacency List </text:span><text:span text:style-name="T13">還不夠好？</text:span></text:h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" loext:marker-style-name="T47"><text:span text:style-name="T47"><text:s text:c="2"/>Adjacency List 的問題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圖形：A ── B ── C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9"/>\ <text:s text:c="6"/>/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10"/>───────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邊：(A,B) <text:s/>(B,C) <text:s/>(A,C) <text:s/>共 3 條邊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但 List 存法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A → [B] → [C] → NULL <text:s text:c="5"/>（A-B、A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B → [A] → [C] → NULL <text:s text:c="5"/>（B-A、B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C → [A] → [B] → NULL <text:s text:c="5"/>（C-A、C-B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3 條邊，卻存了 6 個節點！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更新一條邊要改兩個地方（兩端都要改）→ 容易出錯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7-2 Multilist </text:span><text:span text:style-name="T13">解法：每條邊只存一次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" loext:marker-style-name="T47"><text:span text:style-name="T47"><text:s text:c="2"/>同一張圖，改用 Multilist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只建立 3 個 Edge 節點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1: [V1=A | V2=B | link1=e2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的下一條邊↑ <text:s text:c="2"/>B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2: [V1=A | V2=C | link1=NULL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無其他邊 ↑ <text:s text:c="3"/>C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3: [V1=B | V2=C | link1=NULL | link2=NULL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B 無其他邊 ↑ <text:s text:c="3"/>C 無其他邊 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頂點起始指標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A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B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C → e2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7-3 </text:span><text:span text:style-name="T13">如何利用 </text:span><text:span text:style-name="T12">link1/link2 </text:span><text:span text:style-name="T13">走訪所有邊？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A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A 的起始指標 → e1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A 是 V1 → 走 link1 → e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2 = (A,C)：A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A 的邊：(A,B) 和 (A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B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B 的起始指標 → e1</text:span><text:span text:style-name="T47"/></text:p>
          </table:table-cell>
        </table:table-row>
        <text:soft-page-break/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B 是 V2 → 走 link2 → e3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3 = (B,C)：B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B 的邊：(A,B) 和 (B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關鍵：同一個 Edge 節點，A 走 link1，B 走 link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→ 兩端共用同一個節點，卻各自能找到下一條邊！</text:span><text:span text:style-name="T47"/></text:p>
          </table:table-cell>
        </table:table-row>
      </table:table>
      <text:p text:style-name="P1"/>
      <text:h text:style-name="P32" text:outline-level="2" loext:marker-style-name="T12"><text:span text:style-name="T12">7-4 </text:span><text:span text:style-name="T13">空間與時間複雜度完整推導</text:span></text:h>
      <text:p text:style-name="P13" loext:marker-style-name="T7"><text:span text:style-name="T16"><text:s text:c="2"/>▎ </text:span><text:span text:style-name="T6">空間比較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7"><text:span text:style-name="T47"><text:s text:c="2"/>圖形有 V 個頂點，E 條邊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List（無向圖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2E 個串列節點 = V + 2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Multilist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E 個邊節點 = V + 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→ 邊節點少了一半！（只存一份）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範例（V=100，E=1000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List <text:s text:c="3"/>：100 + 2000 = 2100 個節點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Multilist：100 + 1000 = 1100 個節點（節省 47%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時間：計算所有頂點 </text:span><text:span text:style-name="T16">Degree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7"><text:span text:style-name="T47"><text:s text:c="2"/>Matrix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掃描 n×n 矩陣中每一格 → O(n²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（即使 99% 的格子是 0，也要一格一格看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Multilist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每個 Edge 節點被走訪兩次（V1 端一次，V2 端一次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V 個頂點的起始指標 → O(V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E 個邊節點 × 2 <text:s text:c="4"/>→ O(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總計：O(V + E) = O(n + 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差異對比（n=1000，e=10）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atrix <text:s text:c="3"/>→ 1,000,000 步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ultilist → <text:s text:c="5"/>1,020 步 <text:s/>（快 1000 倍！）</text:span><text:span text:style-name="T47"/></text:p>
          </table:table-cell>
        </table:table-row>
      </table:table>
      <text:h text:style-name="P31" text:outline-level="1" loext:marker-style-name="T4"><text:span text:style-name="T3">八、考試速查表（最終記憶版）</text:span><text:span text:style-name="T4"/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" loext:marker-style-name="T114"><text:span text:style-name="T113">主題</text:span><text:span text:style-name="T114"/></text:p>
          </table:table-cell>
          <table:table-cell table:style-name="表格53.A1" office:value-type="string">
            <text:p text:style-name="P10" loext:marker-style-name="T114"><text:span text:style-name="T113">關鍵字 </text:span><text:span text:style-name="T117">/ </text:span><text:span text:style-name="T113">公式</text:span></text:p>
          </table:table-cell>
          <table:table-cell table:style-name="表格53.A1" office:value-type="string">
            <text:p text:style-name="P3" loext:marker-style-name="T114"><text:span text:style-name="T113">補充說明</text:span><text:span text:style-name="T114"/></text:p>
          </table:table-cell>
        </table:table-row>
        <table:table-row table:style-name="表格53.1">
          <table:table-cell table:style-name="表格53.A2" office:value-type="string">
            <text:p text:style-name="P3" loext:marker-style-name="T9"><text:span text:style-name="T17">BFS</text:span><text:span text:style-name="T9"/></text:p>
          </table:table-cell>
          <table:table-cell table:style-name="表格53.A2" office:value-type="string">
            <text:p text:style-name="P10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10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10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10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10" loext:marker-style-name="T136"><text:span text:style-name="T135">in-degree=0 </text:span><text:span text:style-name="T137">先出</text:span></text:p>
          </table:table-cell>
          <table:table-cell table:style-name="表格53.C2" office:value-type="string">
            <text:p text:style-name="P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ext:soft-page-break/>
        <table:table-row table:style-name="表格53.1">
          <table:table-cell table:style-name="表格53.C3" office:value-type="string">
            <text:p text:style-name="P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10" loext:marker-style-name="T119"><text:span text:style-name="T122">無法 </text:span><text:span text:style-name="T118">Topological Sort</text:span></text:p>
          </table:table-cell>
          <table:table-cell table:style-name="表格53.C3" office:value-type="string">
            <text:p text:style-name="P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10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10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10" loext:marker-style-name="T125"><text:span text:style-name="T126">每條邊只存一次</text:span><text:span text:style-name="T125"/></text:p>
          </table:table-cell>
          <table:table-cell table:style-name="表格53.C2" office:value-type="string">
            <text:p text:style-name="P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"/>
      <text:h text:style-name="P31" text:outline-level="1" loext:marker-style-name="T4"><text:span text:style-name="T3">九、常見申論題標準答案</text:span><text:span text:style-name="T4"/></text:h>
      <text:p text:style-name="P25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26" loext:marker-style-name="T116"><text:span text:style-name="T115">標準答案</text:span><text:span text:style-name="T116"/></text:p>
      <text:p text:style-name="P12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"/>
      <text:p text:style-name="P25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26" loext:marker-style-name="T116"><text:span text:style-name="T115">標準答案</text:span><text:span text:style-name="T116"/></text:p>
      <text:p text:style-name="P12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"/>
      <text:p text:style-name="P25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26" loext:marker-style-name="T116"><text:span text:style-name="T115">標準答案</text:span><text:span text:style-name="T116"/></text:p>
      <text:p text:style-name="P12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12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"/>
      <text:p text:style-name="P25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26" loext:marker-style-name="T116"><text:span text:style-name="T115">標準答案</text:span><text:span text:style-name="T116"/></text:p>
      <text:p text:style-name="P12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12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"/>
      <text:p text:style-name="P11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6:38:33.308000000</dc:date>
    <meta:editing-cycles>126</meta:editing-cycles>
    <meta:editing-duration>PT15H36M45S</meta:editing-duration>
    <meta:generator>MODA_ODF_Application_Tools/3.8.4.2$Windows_X86_64 LibreOffice_project/4fb77107d5af14329e08085efe4fa19b5633383a</meta:generator>
    <meta:document-statistic meta:table-count="59" meta:image-count="0" meta:object-count="0" meta:page-count="22" meta:paragraph-count="841" meta:word-count="8416" meta:character-count="18579" meta:non-whitespace-character-count="13505"/>
    <meta:user-defined meta:name="AppVersion">15.0000</meta:user-defined>
  </office:meta>
</office:document-meta>
</file>