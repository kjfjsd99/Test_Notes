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圖解_5f_六_5f_PQ三種實作" style:display-name="圖解_六_PQ三種實作" style:family="table">
      <style:table-properties style:width="15.875cm" fo:margin-left="0cm" fo:margin-top="0cm" fo:margin-bottom="0cm" table:align="left" style:writing-mode="page"/>
    </style:style>
    <style:style style:name="圖解_5f_六_5f_PQ三種實作.A" style:display-name="圖解_六_PQ三種實作.A" style:family="table-column">
      <style:table-column-properties style:column-width="15.875cm"/>
    </style:style>
    <style:style style:name="圖解_5f_六_5f_PQ三種實作.1" style:display-name="圖解_六_PQ三種實作.1" style:family="table-row">
      <style:table-row-properties fo:keep-together="auto"/>
    </style:style>
    <style:style style:name="圖解_5f_六_5f_PQ三種實作.A1" style:display-name="圖解_六_PQ三種實作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921cm" fo:margin-left="0.071cm" fo:margin-top="0cm" fo:margin-bottom="0cm" table:align="left" style:writing-mode="page"/>
    </style:style>
    <style:style style:name="表格25.A" style:family="table-column">
      <style:table-column-properties style:column-width="15.92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09cm" fo:margin-top="0cm" fo:margin-bottom="0cm" table:align="left" style:writing-mode="page"/>
    </style:style>
    <style:style style:name="表格29.A" style:family="table-column">
      <style:table-column-properties style:column-width="4.41cm"/>
    </style:style>
    <style:style style:name="表格29.B" style:family="table-column">
      <style:table-column-properties style:column-width="3.528cm"/>
    </style:style>
    <style:style style:name="表格29.C" style:family="table-column">
      <style:table-column-properties style:column-width="3.526cm"/>
    </style:style>
    <style:style style:name="表格29.D" style:family="table-column">
      <style:table-column-properties style:column-width="4.457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2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30" style:family="table">
      <style:table-properties style:width="15.921cm" fo:margin-left="0.071cm" fo:margin-top="0cm" fo:margin-bottom="0cm" table:align="left" style:writing-mode="page"/>
    </style:style>
    <style:style style:name="表格30.A" style:family="table-column">
      <style:table-column-properties style:column-width="15.92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9" style:family="table">
      <style:table-properties style:width="15.921cm" fo:margin-left="0.071cm" fo:margin-top="0cm" fo:margin-bottom="0cm" table:align="left" style:writing-mode="page"/>
    </style:style>
    <style:style style:name="表格39.A" style:family="table-column">
      <style:table-column-properties style:column-width="15.92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09cm" fo:margin-top="0cm" fo:margin-bottom="0cm" table:align="left" style:writing-mode="page"/>
    </style:style>
    <style:style style:name="表格45.A" style:family="table-column">
      <style:table-column-properties style:column-width="4.937cm"/>
    </style:style>
    <style:style style:name="表格45.B" style:family="table-column">
      <style:table-column-properties style:column-width="5.47cm"/>
    </style:style>
    <style:style style:name="表格45.C" style:family="table-column">
      <style:table-column-properties style:column-width="5.514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5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5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1" style:family="table">
      <style:table-properties style:width="15.875cm" fo:margin-left="0.004cm" fo:margin-top="0cm" fo:margin-bottom="0cm" table:align="left" style:writing-mode="page"/>
    </style:style>
    <style:style style:name="表格31.A" style:family="table-column">
      <style:table-column-properties style:column-width="3.969cm"/>
    </style:style>
    <style:style style:name="表格31.C" style:family="table-column">
      <style:table-column-properties style:column-width="7.93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5.875cm" fo:margin-left="0.004cm" fo:margin-top="0cm" fo:margin-bottom="0cm" table:align="left" style:writing-mode="page"/>
    </style:style>
    <style:style style:name="表格32.A" style:family="table-column">
      <style:table-column-properties style:column-width="3.96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32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.004cm" fo:margin-top="0cm" fo:margin-bottom="0cm" table:align="left" style:writing-mode="page"/>
    </style:style>
    <style:style style:name="表格36.A" style:family="table-column">
      <style:table-column-properties style:column-width="5.292cm"/>
    </style:style>
    <style:style style:name="表格36.B" style:family="table-column">
      <style:table-column-properties style:column-width="3.528cm"/>
    </style:style>
    <style:style style:name="表格36.C" style:family="table-column">
      <style:table-column-properties style:column-width="7.05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6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" style:family="table">
      <style:table-properties style:width="15.875cm" fo:margin-left="0.004cm" fo:margin-top="0cm" fo:margin-bottom="0cm" table:align="left" style:writing-mode="page"/>
    </style:style>
    <style:style style:name="表格37.A" style:family="table-column">
      <style:table-column-properties style:column-width="5.29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7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Standard">
      <style:paragraph-properties fo:margin-top="0.053cm" fo:margin-bottom="0.053cm" style:contextual-spacing="false"/>
      <style:text-properties fo:color="#ffff00" loext:opacity="100%" fo:font-size="10.5pt" fo:font-weight="bold" fo:background-color="#ff9100" style:font-name-asian="Arial2" style:font-size-asian="10.5pt" style:font-weight-asian="bold" style:font-name-complex="Arial2" style:font-size-complex="10.5pt" style:font-weight-complex="bold"/>
    </style:style>
    <style:style style:name="P4" style:family="paragraph" style:parent-style-name="Standard">
      <style:paragraph-properties fo:margin-top="0.053cm" fo:margin-bottom="0.053cm" style:contextual-spacing="false"/>
      <style:text-properties fo:color="#ffd740" loext:opacity="100%" fo:font-size="10.5pt" fo:font-weight="bold" fo:background-color="#651fff" style:font-name-asian="Arial2" style:font-size-asian="10.5pt" style:font-weight-asian="bold" style:font-name-complex="Arial2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d740" loext:opacity="100%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6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officeooo:paragraph-rsid="009b8ac9"/>
    </style:style>
    <style:style style:name="P7" style:family="paragraph" style:parent-style-name="Heading_20_2">
      <style:paragraph-properties fo:margin-top="0.529cm" fo:margin-bottom="0.247cm" style:contextual-spacing="false"/>
      <style:text-properties officeooo:paragraph-rsid="009b8ac9"/>
    </style:style>
    <style:style style:name="P8" style:family="paragraph" style:parent-style-name="Standard">
      <style:paragraph-properties fo:margin-top="0cm" fo:margin-bottom="0.141cm" style:contextual-spacing="false"/>
      <style:text-properties officeooo:paragraph-rsid="009b8ac9"/>
    </style:style>
    <style:style style:name="P9" style:family="paragraph" style:parent-style-name="Standard">
      <style:paragraph-properties fo:margin-top="0cm" fo:margin-bottom="0.212cm" style:contextual-spacing="false"/>
      <style:text-properties officeooo:paragraph-rsid="009b8ac9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officeooo:paragraph-rsid="009b8ac9"/>
    </style:style>
    <style:style style:name="P1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officeooo:paragraph-rsid="009b8ac9"/>
    </style:style>
    <style:style style:name="P12" style:family="paragraph" style:parent-style-name="Standard">
      <style:paragraph-properties fo:margin-top="0cm" fo:margin-bottom="0.282cm" style:contextual-spacing="false"/>
      <style:text-properties officeooo:paragraph-rsid="009b8ac9"/>
    </style:style>
    <style:style style:name="P13" style:family="paragraph" style:parent-style-name="Standard">
      <style:paragraph-properties fo:margin-top="0cm" fo:margin-bottom="0.071cm" style:contextual-spacing="false"/>
      <style:text-properties officeooo:paragraph-rsid="009b8ac9"/>
    </style:style>
    <style:style style:name="P14" style:family="paragraph" style:parent-style-name="Standard">
      <style:paragraph-properties fo:margin-top="0.053cm" fo:margin-bottom="0.053cm" style:contextual-spacing="false"/>
      <style:text-properties fo:color="#ff3d00" loext:opacity="100%" fo:font-size="10.5pt" fo:font-weight="bold" fo:background-color="#64ffda" style:font-name-asian="Arial2" style:font-size-asian="10.5pt" style:font-weight-asian="bold" style:font-name-complex="Arial2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6ff00" loext:opacity="100%" fo:font-size="10.5pt" fo:font-weight="bold" fo:background-color="#f50057" style:font-name-asian="Arial2" style:font-size-asian="10.5pt" style:font-weight-asian="bold" style:font-name-complex="Arial2" style:font-size-complex="10.5pt" style:font-weight-complex="bold"/>
    </style:style>
    <style:style style:name="P16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7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fo:color="#1f3864" loext:opacity="100%" style:font-name="Arial" fo:font-size="20pt" fo:font-weight="bold" officeooo:paragraph-rsid="009b8ac9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top="0.529cm" fo:margin-bottom="0.247cm" style:contextual-spacing="false"/>
      <style:text-properties fo:color="#2e75b6" loext:opacity="100%" style:font-name="Arial" fo:font-size="15pt" fo:font-weight="bold" officeooo:paragraph-rsid="009b8ac9" style:font-name-asian="Arial2" style:font-size-asian="15pt" style:font-weight-asian="bold" style:font-name-complex="Arial2" style:font-size-complex="15pt" style:font-weight-complex="bold"/>
    </style:style>
    <style:style style:name="P20" style:family="paragraph" style:parent-style-name="List_20_Paragraph" style:list-style-name="WWNum3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2">
      <style:paragraph-properties fo:margin-top="0cm" fo:margin-bottom="0.141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23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4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.106cm" fo:margin-bottom="0.106cm" style:contextual-spacing="false"/>
    </style:style>
    <style:style style:name="P27" style:family="paragraph" style:parent-style-name="Standard">
      <style:paragraph-properties fo:margin-top="0.053cm" fo:margin-bottom="0.053cm" style:contextual-spacing="false"/>
    </style:style>
    <style:style style:name="P28" style:family="paragraph" style:parent-style-name="Standard">
      <style:paragraph-properties fo:margin-top="0.318cm" fo:margin-bottom="0.106cm" style:contextual-spacing="false"/>
    </style:style>
    <style:style style:name="P29" style:family="paragraph" style:parent-style-name="Standard">
      <style:paragraph-properties fo:margin-top="0.053cm" fo:margin-bottom="0.053cm" style:contextual-spacing="false"/>
      <style:text-properties officeooo:paragraph-rsid="001437ec"/>
    </style:style>
    <style:style style:name="P30" style:family="paragraph" style:parent-style-name="Standard" style:list-style-name="WWNum1">
      <style:paragraph-properties fo:margin-top="0.071cm" fo:margin-bottom="0.071cm" style:contextual-spacing="false"/>
    </style:style>
    <style:style style:name="P31" style:family="paragraph" style:parent-style-name="Standard">
      <style:paragraph-properties fo:margin-top="0cm" fo:margin-bottom="0.212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style:text-properties fo:color="#1a1a1a" loext:opacity="100%" style:font-name="Arial" fo:font-size="11pt" officeooo:paragraph-rsid="009b8ac9" style:font-name-asian="Arial2" style:font-size-asian="11pt" style:font-name-complex="Arial2" style:font-size-complex="11pt"/>
    </style:style>
    <style:style style:name="P37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3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39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40" style:family="paragraph" style:parent-style-name="Standard">
      <style:text-properties fo:color="#ffffff" loext:opacity="100%" style:font-name="Arial" fo:font-size="11pt" fo:font-weight="bold" officeooo:paragraph-rsid="009b8ac9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353cm" fo:margin-bottom="0.176cm" style:contextual-spacing="false"/>
      <style:text-properties fo:color="#1f3864" loext:opacity="100%" style:font-name="Arial" fo:font-size="13pt" fo:font-weight="bold" officeooo:paragraph-rsid="009b8ac9" style:font-name-asian="Arial2" style:font-size-asian="13pt" style:font-weight-asian="bold" style:font-name-complex="Arial2" style:font-size-complex="13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2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3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4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2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2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3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4" style:family="text">
      <style:text-properties fo:color="#59595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fo:color="#595959" loext:opacity="100%" style:font-name="Arial1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2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27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28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9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3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35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6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37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1" style:family="text">
      <style:text-properties fo:color="#00e676" loext:opacity="100%"/>
    </style:style>
    <style:style style:name="T42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00e676" loext:opacity="100%" style:font-name="Arial1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44" style:family="text">
      <style:text-properties fo:color="#00e676" loext:opacity="100%" style:font-name="Arial1" fo:font-size="28pt" fo:font-weight="bold" officeooo:rsid="0038b7fb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45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46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7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48" style:family="text">
      <style:text-properties fo:color="#00e676" loext:opacity="100%" fo:background-color="#5d4037" loext:char-shading-value="0"/>
    </style:style>
    <style:style style:name="T49" style:family="text">
      <style:text-properties fo:color="#00e676" loext:opacity="100%" fo:background-color="#5d4037" loext:char-shading-value="0"/>
    </style:style>
    <style:style style:name="T5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18ffff" loext:opacity="100%"/>
    </style:style>
    <style:style style:name="T54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7" style:family="text">
      <style:text-properties fo:color="#18ffff" loext:opacity="100%" style:font-name="Arial1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58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59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60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18ffff" loext:opacity="100%" fo:background-color="#d500f9" loext:char-shading-value="0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4" style:family="text">
      <style:text-properties fo:color="#76ff03" loext:opacity="100%"/>
    </style:style>
    <style:style style:name="T65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6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7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8" style:family="text">
      <style:text-properties fo:color="#76ff03" loext:opacity="100%" fo:background-color="#5d4037" loext:char-shading-value="0"/>
    </style:style>
    <style:style style:name="T69" style:family="text">
      <style:text-properties fo:color="#76ff03" loext:opacity="100%" fo:background-color="#5d4037" loext:char-shading-value="0"/>
    </style:style>
    <style:style style:name="T7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72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3" style:family="text">
      <style:text-properties fo:color="#64ffda" loext:opacity="100%"/>
    </style:style>
    <style:style style:name="T74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75" style:family="text">
      <style:text-properties fo:color="#64ffda" loext:opacity="100%" fo:background-color="#64ffda" loext:char-shading-value="0"/>
    </style:style>
    <style:style style:name="T76" style:family="text">
      <style:text-properties fo:color="#64ffda" loext:opacity="100%" fo:background-color="#64ffda" loext:char-shading-value="0"/>
    </style:style>
    <style:style style:name="T77" style:family="text">
      <style:text-properties fo:color="#ffd740" loext:opacity="100%"/>
    </style:style>
    <style:style style:name="T78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79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80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ffd74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83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84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5" style:family="text">
      <style:text-properties fo:color="#ffd740" loext:opacity="100%" fo:background-color="#3d5afe" loext:char-shading-value="0"/>
    </style:style>
    <style:style style:name="T86" style:family="text">
      <style:text-properties fo:color="#ffd740" loext:opacity="100%" fo:background-color="#3d5afe" loext:char-shading-value="0"/>
    </style:style>
    <style:style style:name="T87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88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89" style:family="text">
      <style:text-properties fo:color="#c6ff00" loext:opacity="100%"/>
    </style:style>
    <style:style style:name="T90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92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93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94" style:family="text">
      <style:text-properties fo:color="#c6ff00" loext:opacity="100%" fo:font-weight="bold" fo:background-color="#18ffff" loext:char-shading-value="0" style:font-weight-asian="bold" style:font-weight-complex="bold"/>
    </style:style>
    <style:style style:name="T9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96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c6ff00" loext:opacity="100%" fo:background-color="#f50057" loext:char-shading-value="0"/>
    </style:style>
    <style:style style:name="T98" style:family="text">
      <style:text-properties fo:color="#c6ff00" loext:opacity="100%" fo:background-color="#f50057" loext:char-shading-value="0"/>
    </style:style>
    <style:style style:name="T99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ff3d00" loext:opacity="100%"/>
    </style:style>
    <style:style style:name="T101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04" style:family="text">
      <style:text-properties fo:color="#ff3d00" loext:opacity="100%" fo:font-size="10.5pt" fo:font-weight="bold" fo:background-color="#00e676" loext:char-shading-value="0" style:font-name-asian="Arial2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ff3d00" loext:opacity="100%" fo:background-color="#64ffda" loext:char-shading-value="0"/>
    </style:style>
    <style:style style:name="T106" style:family="text">
      <style:text-properties fo:color="#ff3d00" loext:opacity="100%" fo:background-color="#64ffda" loext:char-shading-value="0"/>
    </style:style>
    <style:style style:name="T107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10" style:family="text">
      <style:text-properties fo:color="#ffff00" loext:opacity="100%" fo:font-size="10.5pt" fo:font-weight="bold" fo:background-color="#1de9b6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1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114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15" style:family="text">
      <style:text-properties fo:color="#1f3864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16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17" style:family="text">
      <style:text-properties fo:background-color="#ffd740" loext:char-shading-value="0"/>
    </style:style>
    <style:style style:name="T118" style:family="text">
      <style:text-properties fo:background-color="#ffd740" loext:char-shading-value="0"/>
    </style:style>
    <style:style style:name="T119" style:family="text">
      <style:text-properties fo:background-color="#64ffda" loext:char-shading-value="0"/>
    </style:style>
    <style:style style:name="T120" style:family="text">
      <style:text-properties fo:background-color="#64ffda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fo:background-color="#ffff00" loext:char-shading-value="0"/>
    </style:style>
    <style:style style:name="T123" style:family="text">
      <style:text-properties fo:font-weight="bold" fo:background-color="#ffff00" loext:char-shading-value="0" style:font-weight-asian="bold" style:font-weight-complex="bold"/>
    </style:style>
    <style:style style:name="T124" style:family="text">
      <style:text-properties fo:font-weight="bold" fo:background-color="#18ffff" loext:char-shading-value="0" style:font-weight-asian="bold" style:font-weight-complex="bold"/>
    </style:style>
    <style:style style:name="T125" style:family="text">
      <style:text-properties fo:background-color="#18ffff" loext:char-shading-value="0"/>
    </style:style>
    <style:style style:name="T126" style:family="text">
      <style:text-properties fo:background-color="#18ffff" loext:char-shading-value="0"/>
    </style:style>
    <style:style style:name="T127" style:family="text">
      <style:text-properties fo:color="#d500f9" loext:opacity="100%" fo:font-weight="bold" fo:background-color="#18ffff" loext:char-shading-value="0" style:font-weight-asian="bold" style:font-weight-complex="bold"/>
    </style:style>
    <style:style style:name="T128" style:family="text">
      <style:text-properties fo:color="#d500f9" loext:opacity="100%" fo:font-weight="bold" fo:background-color="#ff9100" loext:char-shading-value="0" style:font-weight-asian="bold" style:font-weight-complex="bold"/>
    </style:style>
    <style:style style:name="T12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24" loext:marker-style-name="T12"><text:span text:style-name="T13">資訊類公職考試完整筆記 ● 考點：</text:span><text:span text:style-name="T16">110</text:span><text:span text:style-name="T13">地</text:span><text:span text:style-name="T16">Q4</text:span><text:span text:style-name="T13">、</text:span><text:span text:style-name="T16">111</text:span><text:span text:style-name="T13">地</text:span><text:span text:style-name="T16">Q4</text:span><text:span text:style-name="T13">、</text:span><text:span text:style-name="T16">113</text:span><text:span text:style-name="T13">地</text:span><text:span text:style-name="T16">Q3</text:span><text:span text:style-name="T13">、</text:span><text:span text:style-name="T16">114</text:span><text:span text:style-name="T13">地</text:span><text:span text:style-name="T16">Q2</text:span></text:p>
      <text:p text:style-name="P1"/>
      <text:h text:style-name="P16" text:outline-level="1" loext:marker-style-name="T3"><text:span text:style-name="T4">一、</text:span><text:span text:style-name="T3">Heap </text:span><text:span text:style-name="T4">的定義與兩大條件</text:span></text:h>
      <text:p text:style-name="P26" loext:marker-style-name="T18"><text:span text:style-name="T35">Heap</text:span><text:span text:style-name="T19">（堆積）是一種特殊的二元樹，必須同時滿足以下兩個條件，缺一不可：</text:span></text:p>
      <text:p text:style-name="P1"/>
      <text:h text:style-name="P18" text:outline-level="2" loext:marker-style-name="T14"><text:span text:style-name="T15">條件</text:span><text:span text:style-name="T14">1</text:span><text:span text:style-name="T15">：</text:span><text:span text:style-name="T14">Complete Binary Tree</text:span><text:span text:style-name="T15">（完全二元樹）</text:span></text:h>
      <text:list xml:id="list612247552" text:style-name="WWNum3">
        <text:list-item text:start-value="1">
          <text:p text:style-name="P20" loext:marker-style-name="T26"><text:span text:style-name="T42">每一層節點都必須盡量填滿</text:span><text:span text:style-name="T27">。</text:span></text:p>
        </text:list-item>
        <text:list-item text:style-override="WWNum2">
          <text:p text:style-name="P21" loext:marker-style-name="T26"><text:span text:style-name="T28">最後一層</text:span><text:span text:style-name="T27">的節點必須</text:span><text:span text:style-name="T52">從左往右依序填入</text:span><text:span text:style-name="T27">，</text:span><text:span text:style-name="T54">不可跳過</text:span><text:span text:style-name="T27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33"><text:span text:style-name="T36">✅ </text:span><text:span text:style-name="T34">合法 </text:span><text:span text:style-name="T36">Complete Binary Tree</text:span><text:span text:style-name="T34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7"/>10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90 <text:s text:c="4"/>8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/ \ <text:s text:c="5"/>/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29"><text:span text:style-name="T37">70 <text:s/>60 50</text:span><text:span text:style-name="T29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❌ </text:span><text:span text:style-name="T3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7"/>10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90 <text:s text:c="4"/>8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\ <text:s text:c="2"/>/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6"/></text:span><text:span text:style-name="T37">60 50</text:span></text:p>
          </table:table-cell>
        </table:table-row>
      </table:table>
      <text:p text:style-name="P1"/>
      <text:h text:style-name="P18" text:outline-level="2" loext:marker-style-name="T14"><text:span text:style-name="T15">條件</text:span><text:span text:style-name="T14">2</text:span><text:span text:style-name="T15">：</text:span><text:span text:style-name="T14">Heap Property</text:span><text:span text:style-name="T15">（堆積性質）</text:span></text:h>
      <text:p text:style-name="P26" loext:marker-style-name="T18"><text:span text:style-name="T19">父節點與子節點之間必須滿足固定的大小關係，分為兩種：</text:span><text:span text:style-name="T1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25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25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25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5" loext:marker-style-name="T33"><text:span text:style-name="T65">Min</text:span><text:span text:style-name="T36"> Heap</text:span></text:p>
          </table:table-cell>
          <table:table-cell table:style-name="表格2.A2" office:value-type="string">
            <text:p text:style-name="P25" loext:marker-style-name="T33"><text:span text:style-name="T36">parent ≤ child</text:span><text:span text:style-name="T34">（</text:span><text:span text:style-name="T30">父小子大</text:span><text:span text:style-name="T34">）</text:span></text:p>
          </table:table-cell>
          <table:table-cell table:style-name="表格2.A2" office:value-type="string">
            <text:p text:style-name="P25" loext:marker-style-name="T33"><text:span text:style-name="T36">Root </text:span><text:span text:style-name="T34">必為最小值</text:span></text:p>
          </table:table-cell>
        </table:table-row>
        <table:table-row table:style-name="表格2.1">
          <table:table-cell table:style-name="表格2.A3" office:value-type="string">
            <text:p text:style-name="P25" loext:marker-style-name="T33"><text:span text:style-name="T72">Max</text:span><text:span text:style-name="T36"> Heap</text:span></text:p>
          </table:table-cell>
          <table:table-cell table:style-name="表格2.A3" office:value-type="string">
            <text:p text:style-name="P25" loext:marker-style-name="T33"><text:span text:style-name="T36">parent ≥ child</text:span><text:span text:style-name="T34">（</text:span><text:span text:style-name="T31">父大子小</text:span><text:span text:style-name="T34">）</text:span></text:p>
          </table:table-cell>
          <table:table-cell table:style-name="表格2.A3" office:value-type="string">
            <text:p text:style-name="P25" loext:marker-style-name="T33"><text:span text:style-name="T36">Root </text:span><text:span text:style-name="T34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33"><text:span text:style-name="T36">📌 </text:span><text:span text:style-name="T3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33"><text:span text:style-name="T37">Heap</text:span><text:span text:style-name="T36"> = </text:span><text:span text:style-name="T74">Complete Binary Tree + Heap Property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二、</text:span><text:span text:style-name="T3">Heap </text:span><text:span text:style-name="T4">的陣列表示法（</text:span><text:span text:style-name="T3">Implicit Array</text:span><text:span text:style-name="T4">）</text:span></text:h>
      <text:p text:style-name="P26" loext:marker-style-name="T18"><text:span text:style-name="T19">由於 </text:span><text:span text:style-name="T78">Heap </text:span><text:span text:style-name="T79">是 </text:span><text:span text:style-name="T78">Complete Binary Tree</text:span><text:span text:style-name="T19">，</text:span><text:span text:style-name="T88">節點位置完全可預測</text:span><text:span text:style-name="T19">，因此不需要指標（</text:span><text:span text:style-name="T35">pointer</text:span><text:span text:style-name="T19">），直接用陣列儲存即可，這稱為 </text:span><text:span text:style-name="T35">Implicit Array</text:span><text:span text:style-name="T1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33"><text:span text:style-name="T34">【索引公式 — 考試必背】</text:span><text:span text:style-name="T33"/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Root <text:s text:c="5"/>→ A[1]</text:span><text:span text:style-name="T33"/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90">Parent</text:span><text:span text:style-name="T36"> <text:s text:c="3"/>→ A[</text:span><text:span text:style-name="T59">i / 2</text:span><text:span text:style-name="T36">] <text:s text:c="5"/></text:span><text:span text:style-name="T34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83">Left child</text:span><text:span text:style-name="T36"> → A[</text:span><text:span text:style-name="T66">2i</text:span><text:span text:style-name="T36">] <text:s text:c="6"/></text:span><text:span text:style-name="T34">（</text:span><text:span text:style-name="T99">多生貴子</text:span><text:span text:style-name="T34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83">Right child</text:span><text:span text:style-name="T36"> → A[</text:span><text:span text:style-name="T66">2i + 1</text:span><text:span text:style-name="T36">]</text:span></text:p>
          </table:table-cell>
        </table:table-row>
      </table:table>
      <text:p text:style-name="P1"/>
      <text:h text:style-name="P18" text:outline-level="2" loext:marker-style-name="T14"><text:span text:style-name="T15">範例</text:span><text:span text:style-name="T14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33"><text:span text:style-name="T34">樹狀結構：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5"/>90 <text:s text:c="4"/>8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5"/>/ \ <text:s text:c="4"/>/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/>70 <text:s/>60 5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4">陣列儲存：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2"/>Index: <text:s/>1 <text:s text:c="3"/>2 <text:s text:c="3"/>3 <text:s text:c="3"/>4 <text:s text:c="3"/>5 <text:s text:c="3"/>6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2"/>Value: 100 <text:s text:c="2"/>90 <text:s text:c="2"/>80 <text:s text:c="2"/>70 <text:s text:c="2"/>60 <text:s text:c="2"/>5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4">驗證：</text:span><text:span text:style-name="T36">A[5] = 60</text:span><text:span text:style-name="T34">，</text:span><text:span text:style-name="T36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6"/>Left child = A[10]</text:span><text:span text:style-name="T34">，</text:span><text:span text:style-name="T36">Right child = A[11]</text:span><text:span text:style-name="T34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33"><text:span text:style-name="T36">⚠️ <text:s/></text:span><text:span text:style-name="T34">考試陷阱：</text:span><text:span text:style-name="T55">陣列索引從 </text:span><text:span text:style-name="T59">1 </text:span><text:span text:style-name="T55">開始</text:span><text:span text:style-name="T34">，</text:span><text:span text:style-name="T28">不是 </text:span><text:span text:style-name="T37">0</text:span><text:span text:style-name="T34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3"><text:span text:style-name="T36"><text:s text:c="5"/></text:span><text:span text:style-name="T34">若從 </text:span><text:span text:style-name="T36">0 </text:span><text:span text:style-name="T34">開始則公式不同：</text:span><text:span text:style-name="T36">parent=(i-1)/2, left=2i+1, right=2i+2</text:span><text:span text:style-name="T34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3"><text:span text:style-name="T36"><text:s text:c="5"/></text:span><text:span text:style-name="T34">考題若未特別說明，預設從 </text:span><text:span text:style-name="T36">1 </text:span><text:span text:style-name="T34">開始。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三、</text:span><text:span text:style-name="T3">Heap </text:span><text:span text:style-name="T4">的核心操作與時間複雜度</text:span></text:h>
      <text:h text:style-name="P18" text:outline-level="2" loext:marker-style-name="T14"><text:span text:style-name="T14">3-1 </text:span><text:span text:style-name="T15">插入（</text:span><text:span text:style-name="T14">Insert</text:span><text:span text:style-name="T15">）— </text:span><text:span text:style-name="T14">Bubble Up</text:span><text:span text:style-name="T15">（向上浮）</text:span></text:h>
      <text:p text:style-name="P26" loext:marker-style-name="T18"><text:span text:style-name="T19">步驟：</text:span><text:span text:style-name="T18"/></text:p>
      <text:list text:continue-list="list612247552" text:style-name="WWNum2">
        <text:list-item>
          <text:p text:style-name="P21" loext:marker-style-name="T26"><text:span text:style-name="T40">Step 1</text:span><text:span text:style-name="T27">：</text:span><text:span text:style-name="T101">將新元素放到陣列最後一個位置</text:span><text:span text:style-name="T27">（</text:span><text:span text:style-name="T40">Complete Binary Tree </text:span><text:span text:style-name="T27">的下一個</text:span><text:span text:style-name="T28">空位</text:span><text:span text:style-name="T27">）。</text:span></text:p>
        </text:list-item>
        <text:list-item>
          <text:p text:style-name="P21" loext:marker-style-name="T26"><text:span text:style-name="T40">Step 2</text:span><text:span text:style-name="T27">：</text:span><text:span text:style-name="T92">與父節點比較</text:span><text:span text:style-name="T27">，若違反 </text:span><text:span text:style-name="T40">Heap Property</text:span><text:span text:style-name="T27">，則交換。</text:span></text:p>
        </text:list-item>
        <text:list-item>
          <text:p text:style-name="P21" loext:marker-style-name="T26"><text:span text:style-name="T40">Step 3</text:span><text:span text:style-name="T27">：重複 </text:span><text:span text:style-name="T40">Step 2</text:span><text:span text:style-name="T27">，一路往上，直到滿足 </text:span><text:span text:style-name="T40">Heap Property </text:span><text:span text:style-name="T27">或抵達 </text:span><text:span text:style-name="T40">Root </text:span><text:span text:style-name="T27">為止。</text:span></text:p>
        </text:list-item>
      </text:list>
      <text:p text:style-name="P1"/>
      <text:p text:style-name="P28" loext:marker-style-name="T7"><text:span text:style-name="T8">完整範例：</text:span><text:span text:style-name="T10">Max Heap </text:span><text:span text:style-name="T8">插入 </text:span><text:span text:style-name="T10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33"><text:span text:style-name="T34">原始 </text:span><text:span text:style-name="T36">Max Heap</text:span><text:span text:style-name="T34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6"/>90 <text:s text:c="3"/>8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5"/>/ <text:s/>\ <text:s text:c="3"/>/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70 <text:s/>60 5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1</text:span><text:span text:style-name="T34">：</text:span><text:span text:style-name="T28">插入 </text:span><text:span text:style-name="T37">95</text:span><text:span text:style-name="T36"> → </text:span><text:span text:style-name="T30">放到 </text:span><text:span text:style-name="T38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2</text:span><text:span text:style-name="T34">：</text:span><text:span text:style-name="T36">95 </text:span><text:span text:style-name="T34">的 </text:span><text:span text:style-name="T36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</text:span><text:span text:style-name="T37">95 &gt; 80</text:span><text:span text:style-name="T36"> → </text:span><text:span text:style-name="T34">違反 </text:span><text:span text:style-name="T36">Max Heap → </text:span><text:span text:style-name="T32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</text:span><text:span text:style-name="T39">95</text:span><text:span text:style-name="T36">, 70, 60, 50, </text:span><text:span text:style-name="T39">80</text:span><text:span text:style-name="T36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3</text:span><text:span text:style-name="T34">：</text:span><text:span text:style-name="T36">95 </text:span><text:span text:style-name="T34">的 </text:span><text:span text:style-name="T36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</text:span><text:span text:style-name="T37"><text:s/>95 &lt; 100</text:span><text:span text:style-name="T36"> → </text:span><text:span text:style-name="T34">符合 </text:span><text:span text:style-name="T36">Max Heap → </text:span><text:span text:style-name="T32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33"><text:span text:style-name="T34">最終結果：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6"/>90 <text:s text:c="3"/>95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5"/>/ <text:s/>\ <text:s text:c="2"/>/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4"/>70 <text:s/>60 80</text:span><text:span text:style-name="T33"/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33"><text:span text:style-name="T34">時間複雜度：</text:span><text:span text:style-name="T36">O(log n) <text:s/>← </text:span><text:span text:style-name="T34">最多往上走樹高（</text:span><text:span text:style-name="T36">h = log₂n</text:span><text:span text:style-name="T34">）步</text:span></text:p>
          </table:table-cell>
        </table:table-row>
      </table:table>
      <text:p text:style-name="P1"/>
      <text:p text:style-name="P1"/>
      <text:h text:style-name="P18" text:outline-level="2" loext:marker-style-name="T14"><text:span text:style-name="T14">3-2 </text:span><text:span text:style-name="T56">刪除最大值</text:span><text:span text:style-name="T15">（</text:span><text:span text:style-name="T14">Delete / Extract-Max</text:span><text:span text:style-name="T15">）— </text:span><text:span text:style-name="T14">Heapify</text:span><text:span text:style-name="T15">（向下沉）</text:span></text:h>
      <text:p text:style-name="P26" loext:marker-style-name="T18"><text:span text:style-name="T19">步驟：</text:span><text:span text:style-name="T18"/></text:p>
      <text:list text:continue-numbering="true" text:style-name="WWNum2">
        <text:list-item>
          <text:p text:style-name="P21" loext:marker-style-name="T26"><text:span text:style-name="T40">Step 1</text:span><text:span text:style-name="T27">：</text:span><text:span text:style-name="T101">取出 </text:span><text:span text:style-name="T103">Root</text:span><text:span text:style-name="T101">（最大值）</text:span><text:span text:style-name="T27">。</text:span></text:p>
        </text:list-item>
        <text:list-item>
          <text:p text:style-name="P21" loext:marker-style-name="T26"><text:span text:style-name="T40">Step 2</text:span><text:span text:style-name="T27">：</text:span><text:span text:style-name="T82">將陣列最後一個元素移到 </text:span><text:span text:style-name="T83">Root </text:span><text:span text:style-name="T82">位置。</text:span></text:p>
        </text:list-item>
        <text:list-item>
          <text:p text:style-name="P21" loext:marker-style-name="T26"><text:span text:style-name="T40">Step 3</text:span><text:span text:style-name="T27">：</text:span><text:span text:style-name="T92">與兩個子節點中</text:span><text:span text:style-name="T107">較大的</text:span><text:span text:style-name="T92">比較</text:span><text:span text:style-name="T27">，若違反 </text:span><text:span text:style-name="T40">Heap Property</text:span><text:span text:style-name="T27">，則交換。</text:span></text:p>
        </text:list-item>
        <text:list-item>
          <text:p text:style-name="P21" loext:marker-style-name="T26"><text:span text:style-name="T40">Step 4</text:span><text:span text:style-name="T27">：重複 </text:span><text:span text:style-name="T40">Step 3</text:span><text:span text:style-name="T27">（</text:span><text:span text:style-name="T40">Heapify / Bubble Down</text:span><text:span text:style-name="T27">），一路往下，直到滿足條件或抵達葉節點。</text:span></text:p>
        </text:list-item>
      </text:list>
      <text:p text:style-name="P1"/>
      <text:p text:style-name="P28" loext:marker-style-name="T7"><text:span text:style-name="T8">完整範例：</text:span><text:span text:style-name="T10">Max Heap </text:span><text:span text:style-name="T8">刪除 </text:span><text:span text:style-name="T10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33"><text:span text:style-name="T34">原始 </text:span><text:span text:style-name="T36">Max Heap</text:span><text:span text:style-name="T34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10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90 <text:s text:c="3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 <text:s text:c="2"/>/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/>70 <text:s/>60 <text:s/>5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1</text:span><text:span text:style-name="T34">：取出 </text:span><text:span text:style-name="T36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2</text:span><text:span text:style-name="T34">：把最後元素 </text:span><text:span text:style-name="T36">50 </text:span><text:span text:style-name="T34">移到 </text:span><text:span text:style-name="T36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5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9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4"/>70 <text:s/>60</text:span><text:span text:style-name="T33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3</text:span><text:span text:style-name="T34">：</text:span><text:span text:style-name="T36">50 </text:span><text:span text:style-name="T34">的子節點 </text:span><text:span text:style-name="T36">90</text:span><text:span text:style-name="T34">、</text:span><text:span text:style-name="T36">80</text:span><text:span text:style-name="T34">，較大為 </text:span><text:span text:style-name="T36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50 &lt; 90 → </text:span><text:span text:style-name="T34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9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5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4"/>70 <text:s/>6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4</text:span><text:span text:style-name="T34">：</text:span><text:span text:style-name="T36">50 </text:span><text:span text:style-name="T34">的子節點 </text:span><text:span text:style-name="T36">70</text:span><text:span text:style-name="T34">、</text:span><text:span text:style-name="T36">60</text:span><text:span text:style-name="T34">，較大為 </text:span><text:span text:style-name="T36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50 &lt; 70 → </text:span><text:span text:style-name="T34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9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7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3"/>50 <text:s/>6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5</text:span><text:span text:style-name="T34">：</text:span><text:span text:style-name="T36">50 </text:span><text:span text:style-name="T3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4">最終陣列：</text:span><text:span text:style-name="T36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33"><text:span text:style-name="T34">時間複雜度：</text:span><text:span text:style-name="T36">O(log n) <text:s/>← </text:span><text:span text:style-name="T34">最多往下走樹高（</text:span><text:span text:style-name="T36">h = log₂n</text:span><text:span text:style-name="T34">）步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四、建立 Heap（</text:span><text:span text:style-name="T3">Build Heap</text:span><text:span text:style-name="T4">）</text:span></text:h>
      <text:h text:style-name="P18" text:outline-level="2" loext:marker-style-name="T14"><text:span text:style-name="T15">方法 A：逐個插入法</text:span><text:span text:style-name="T14"/></text:h>
      <text:p text:style-name="P26" loext:marker-style-name="T20"><text:span text:style-name="T21">從</text:span><text:span text:style-name="T58">空</text:span><text:span text:style-name="T21"> </text:span><text:span text:style-name="T22">Heap</text:span><text:span text:style-name="T21"> 開始，呼叫 </text:span><text:span text:style-name="T67">n 次 Insert</text:span><text:span text:style-name="T21">，每次 </text:span><text:span text:style-name="T102">O(log n)</text:span><text:span text:style-name="T2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33"><text:span text:style-name="T36">總時間：</text:span><text:span text:style-name="T91">n × O(log n)</text:span><text:span text:style-name="T36"> = O(n log n)</text:span></text:p>
          </table:table-cell>
        </table:table-row>
      </table:table>
      <text:p text:style-name="P1"/>
      <text:h text:style-name="P18" text:outline-level="2" loext:marker-style-name="T14"><text:span text:style-name="T15">方法 B：</text:span><text:span text:style-name="T14">Bottom-Up Build Heap</text:span><text:span text:style-name="T15">（</text:span><text:span text:style-name="T14">Floyd</text:span><text:span text:style-name="T15"> 演算法）★考試重點★</text:span></text:h>
      <text:p text:style-name="P26" loext:marker-style-name="T20"><text:span text:style-name="T21">直接</text:span><text:span text:style-name="T108">將 n 個元素放入陣列</text:span><text:span text:style-name="T21">，從</text:span><text:span text:style-name="T58">最後一個非葉節點（index = ⌊n/2⌋）開始</text:span><text:span text:style-name="T21">，</text:span><text:span text:style-name="T93">由下往上</text:span><text:span text:style-name="T21">逐一執行 Heapify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">★ 為何從 ⌊n/2⌋ 開始？</text:p>
          </table:table-cell>
        </table:table-row>
        <table:table-row table:style-name="表格12.1">
          <table:table-cell table:style-name="表格12.A1" office:value-type="string">
            <text:p text:style-name="P2" loext:marker-style-name="T33"><text:span text:style-name="T59">index &gt; ⌊n/2⌋ 的節點全部都是葉節點</text:span><text:span text:style-name="T36">（</text:span><text:span text:style-name="T46">無子節點</text:span><text:span text:style-name="T36">），</text:span></text:p>
          </table:table-cell>
        </table:table-row>
        <table:table-row table:style-name="表格12.1">
          <table:table-cell table:style-name="表格12.A1" office:value-type="string">
            <text:p text:style-name="P29" loext:marker-style-name="T33"><text:span text:style-name="T36">葉節點本身已滿足 Heap Property(</text:span><text:span text:style-name="T91">Heap Property就是比較父節點vs子節點</text:span><text:span text:style-name="T36">；</text:span><text:span text:style-name="T103">葉節點沒有孩子 → 沒有東西可以比較 </text:span><text:span text:style-name="T33">→ 一定合法</text:span><text:span text:style-name="T36">。)，不需要 Heapify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33"><text:span text:style-name="T36">因此</text:span><text:span text:style-name="T83">只需從 index ⌊n/2⌋ 往 index 1 逐一執行</text:span><text:span text:style-name="T36">。</text:span></text:p>
          </table:table-cell>
        </table:table-row>
      </table:table>
      <text:p text:style-name="P1"/>
      <text:p text:style-name="P26" loext:marker-style-name="T20"><text:span text:style-name="T23">範例：將 [50, 30, 80, 10, 20, 70, 90] 建成 Max Heap</text:span><text:span text:style-name="T24"/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33"><text:span text:style-name="T36">初始陣列（index 從 1 開始）：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index： <text:s/>1 <text:s text:c="3"/>2 <text:s text:c="3"/>3 <text:s text:c="3"/>4 <text:s text:c="3"/>5 <text:s text:c="3"/>6 <text:s text:c="3"/>7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value： <text:s/>50 <text:s text:c="2"/>30 <text:s text:c="2"/>80 <text:s text:c="2"/>10 <text:s text:c="2"/>20 <text:s text:c="2"/>70 <text:s text:c="2"/>90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7">n = 7</text:span><text:span text:style-name="T36">，</text:span><text:span text:style-name="T47">最後非葉節點 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（</text:span><text:span text:style-name="T60">index 4、5、6、7 皆為葉節點</text:span><text:span text:style-name="T36">，不需 Heapify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初始樹狀結構：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13"/>50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12"/>/ <text:s/>\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8"/>30 <text:s text:c="3"/>80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7"/>/ \ <text:s text:c="6"/>/ \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3"/>10 <text:s/>20 70 <text:s/>90</text:span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33"><text:span text:style-name="T36">→ Heapify(3)：index 3 = 8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子節點：index 6 = 70，index 7 = 9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</text:span><text:span text:style-name="T39">Max Heap 要求父 ≥ 子</text:span><text:span text:style-name="T36">，但 80 &lt; 90 → 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80 與 90 交換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交換後：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13"/>5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13"/>/ <text:s/>\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8"/>30 <text:s text:c="3"/>90 <text:s text:c="5"/>← 90 上來了</text:span><text:span text:style-name="T33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33"><text:span text:style-name="T36"><text:s text:c="5"/>/ \ <text:s text:c="6"/>/ \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/>10 <text:s/>20 70 <text:s/>80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陣列：[50, 30, 90, 10, 20, 70, 80]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80 已是葉節點 → 停止</text:span><text:span text:style-name="T33"/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33"><text:span text:style-name="T36">→ Heapify(2)：index 2 = 3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子節點：index 4 = 10，index 5 = 2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30 ≥ 20 且 30 ≥ 10 → 符合 Max Heap → 無需交換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樹狀結構不變：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11"/>5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8"/>30 <text:s text:c="3"/>9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5"/>10 <text:s/>20 70 <text:s/>8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陣列：[50, 30, 90, 10, 20, 70, 80]</text:span><text:span text:style-name="T33"/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33"><text:span text:style-name="T36">→ Heapify(1)：index 1 = 5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子節點：index 2 = 30，index 3 = 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59">較大子節點</text:span><text:span text:style-name="T36">為 90 &gt; 50 → </text:span><text:span text:style-name="T37">50 與 9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第 1 步交換後：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8"/>30 <text:s text:c="3"/>50 <text:s text:c="5"/>← 50 下沉到 index 3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5"/>10 <text:s/>20 70 <text:s/>8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陣列：[90, 30, 50, 10, 20, 70, 80]</text:span><text:span text:style-name="T33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103">50 繼續下沉</text:span><text:span text:style-name="T36">：子節點 index 6 = 70，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59">較大子節點</text:span><text:span text:style-name="T36">為 80 &gt; 50 → 50 與 8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第 2 步交換後：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8"/>30 <text:s text:c="3"/>80 <text:s text:c="5"/>← 80 上來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5"/>10 <text:s/>20 70 <text:s/>50 <text:s text:c="3"/>← 50 落到葉節點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50 已是葉節點 → 停止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陣列：[90, 30, 80, 10, 20, 70, 50]</text:span><text:span text:style-name="T33"/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33"><text:span text:style-name="T36">最終結果：Max Heap ✓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8"/>30 <text:s text:c="3"/>8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5"/>10 <text:s/>20 70 <text:s/>5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陣列：[90, 30, 80, 10, 20, 70, 50]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★ </text:span><text:span text:style-name="T56">為何 </text:span><text:span text:style-name="T57">Bottom-Up Build Heap</text:span><text:span text:style-name="T56"> =</text:span><text:span text:style-name="T15"> </text:span><text:span text:style-name="T109">O(n)</text:span><text:span text:style-name="T15">？</text:span></text:h>
      <text:p text:style-name="P26" loext:marker-style-name="T20"><text:span text:style-name="T21">關鍵直覺：</text:span><text:span text:style-name="T93">每個節點 Heapify 的代價 = 它在樹中的「高度」</text:span><text:span text:style-name="T21">（</text:span><text:span text:style-name="T80">往下最多能走幾層</text:span><text:span text:style-name="T21">）。</text:span></text:p>
      <text:p text:style-name="P26" loext:marker-style-name="T20"><text:span text:style-name="T21">高度愈低的節點數量愈多，代價愈小；高度愈高的節點數量愈少，代價愈大。兩者相乘加總後收斂至 O(n)。</text:span><text:span text:style-name="T20"/></text:p>
      <text:p text:style-name="P1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33"><text:span text:style-name="T36">數學推導（高度加總法）：</text:span><text:span text:style-name="T43">(後</text:span><text:span text:style-name="T44">補</text:span><text:span text:style-name="T43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高度為 h 的節點數量 ≤ ⌈n / 2^(h+1)⌉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每個高度 h 的節點，Heapify 最多走 h 步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T(n) = Σ(h=0 到 ⌊log n⌋) <text:s/>⌈n/2^(h+1)⌉ × h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7"/>≤ n × Σ(h=0 到 ∞) <text:s/>h / 2^h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7"/>= n × 2 <text:s/>= <text:s/>O(n)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（∑ h/2^h 是收斂等比級數，值為 2）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白話理解：葉節點約佔一半，Heapify 代價為 0；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4">往上每層節點數減半，代價只加 1。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110">整體工作量被大量葉節點的「零代價」攤平</text:span><text:span text:style-name="T36">，總代價 ∝ n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25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25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25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5">逐個 Insert</text:p>
          </table:table-cell>
          <table:table-cell table:style-name="表格19.A2" office:value-type="string">
            <text:p text:style-name="P25" loext:marker-style-name="T33"><text:span text:style-name="T36">O(</text:span><text:span text:style-name="T37">n log n</text:span><text:span text:style-name="T36">)</text:span></text:p>
          </table:table-cell>
          <table:table-cell table:style-name="表格19.A2" office:value-type="string">
            <text:p text:style-name="P25" loext:marker-style-name="T33"><text:span text:style-name="T36">動態逐一加入</text:span><text:span text:style-name="T33"/></text:p>
          </table:table-cell>
        </table:table-row>
        <table:table-row table:style-name="表格19.1">
          <table:table-cell table:style-name="表格19.A3" office:value-type="string">
            <text:p text:style-name="P5">Bottom-Up Build Heap</text:p>
          </table:table-cell>
          <table:table-cell table:style-name="表格19.A3" office:value-type="string">
            <text:p text:style-name="P25" loext:marker-style-name="T33"><text:span text:style-name="T36">O(</text:span><text:span text:style-name="T37">n</text:span><text:span text:style-name="T36">) ★</text:span></text:p>
          </table:table-cell>
          <table:table-cell table:style-name="表格19.A3" office:value-type="string">
            <text:p text:style-name="P25" loext:marker-style-name="T33"><text:span text:style-name="T36">一次性建立</text:span><text:span text:style-name="T33"/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五、</text:span><text:span text:style-name="T3">Heap Sort</text:span><text:span text:style-name="T4">（堆積排序）</text:span></text:h>
      <text:p text:style-name="P26" loext:marker-style-name="T20"><text:span text:style-name="T21">Heap Sort 利用 Heap 結構進行排序，分為兩個階段：</text:span><text:span text:style-name="T20"/></text:p>
      <text:p text:style-name="P1"/>
      <text:list xml:id="list2707033212" text:style-name="WWNum1">
        <text:list-item>
          <text:p text:style-name="P30" loext:marker-style-name="T20"><text:span text:style-name="T21">Phase 1：</text:span><text:span text:style-name="T81">Build Heap</text:span><text:span text:style-name="T21"> — </text:span><text:span text:style-name="T114">將原始陣列建成 Max Heap</text:span><text:span text:style-name="T21">，時間 O(n)。</text:span></text:p>
        </text:list-item>
        <text:list-item>
          <text:p text:style-name="P30" loext:marker-style-name="T20"><text:span text:style-name="T21">Phase 2：</text:span><text:span text:style-name="T58">反覆 Extract-Max</text:span><text:span text:style-name="T21"> — </text:span><text:span text:style-name="T45">取出 Root（最大值），放到陣列末端</text:span><text:span text:style-name="T21">，</text:span><text:span text:style-name="T22">再 Heapify</text:span><text:span text:style-name="T21">，重複 </text:span><text:span text:style-name="T25">n-1</text:span><text:span text:style-name="T21"> 次，每次 O(</text:span><text:span text:style-name="T93">log n</text:span><text:span text:style-name="T21">)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33"><text:span text:style-name="T36">Heap Sort 總時間 = O(</text:span><text:span text:style-name="T37">n</text:span><text:span text:style-name="T36">) + O(</text:span><text:span text:style-name="T37">n log n</text:span><text:span text:style-name="T36">) = O(</text:span><text:span text:style-name="T91">n log n</text:span><text:span text:style-name="T36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33"><text:span text:style-name="T36">空間複雜度 = O(1)（In-place，不需額外陣列）</text:span><text:span text:style-name="T33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33"><text:span text:style-name="T36">穩定性 = 不穩定（Unstable）</text:span><text:span text:style-name="T33"/></text:p>
          </table:table-cell>
        </table:table-row>
      </table:table>
      <text:p text:style-name="P1"/>
      <text:p text:style-name="P26" loext:marker-style-name="T20"><text:span text:style-name="T23">範例：對 [4, 2, 7, 1, 5] 排序</text:span><text:span text:style-name="T24"/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33"><text:span text:style-name="T36">Phase 1 — </text:span><text:span text:style-name="T84">Build Max Heap</text:span><text:span text:style-name="T36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原始：[4, 2, 7, 1, 5]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7">n=5</text:span><text:span text:style-name="T36">，</text:span><text:span text:style-name="T66">最後非葉節點 = </text:span><text:span text:style-name="T59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初始樹狀：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</text:span><text:span text:style-name="T59"><text:s/>2</text:span><text:span text:style-name="T36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5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83">Heapify(2)</text:span><text:span text:style-name="T36">：</text:span><text:span text:style-name="T37">2 的子節點 1, 5</text:span><text:span text:style-name="T36">；</text:span><text:span text:style-name="T91">5 &gt; 2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6"/>5 <text:s text:c="2"/>7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2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83">Heapify(1)</text:span><text:span text:style-name="T36">：</text:span><text:span text:style-name="T37">4 的子節點 5, 7</text:span><text:span text:style-name="T36">；</text:span><text:span text:style-name="T91">7 &gt; 4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7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6"/>5 <text:s text:c="2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2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Max Heap 完成：[7, 5, 4, 1, 2]</text:span><text:span text:style-name="T33"/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33"><text:span text:style-name="T36">Phase 2 — </text:span><text:span text:style-name="T104">反覆</text:span><text:span text:style-name="T36"> </text:span><text:span text:style-name="T59">Extract-Max</text:span><text:span text:style-name="T36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33"><text:span text:style-name="T36">Step 1：取出 Root=7，末端 2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5, 2, 4, 1 |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5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2 <text:s text:c="2"/>4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5"/>/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4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2：取出 Root=5，末端 1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4, 2, 1 |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2 <text:s text:c="2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3：取出 Root=4，末端 1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2, 1 | 4,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2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4：取出 Root=2，末端 1 移到 Root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1 | 2, 4,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14">最終排序（升冪）：[1, 2, 4, 5, 7] ✓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六、優先佇列（</text:span><text:span text:style-name="T3">Priority Queue</text:span><text:span text:style-name="T4">）實作方式比較</text:span></text:h>
      <text:p text:style-name="P26" loext:marker-style-name="T20"><text:span text:style-name="T45">Priority Queue（優先佇列）</text:span><text:span text:style-name="T21">是</text:span><text:span text:style-name="T80">每次取出「優先值最高」元素的資料結構</text:span><text:span text:style-name="T2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25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25" loext:marker-style-name="T5"><text:span text:style-name="T6">Insert</text:span><text:span text:style-name="T5"/></text:p>
            </table:table-cell>
            <table:table-cell table:style-name="表格23.A1" office:value-type="string">
              <text:p text:style-name="P25" loext:marker-style-name="T5"><text:span text:style-name="T6">Extract-Max（取最大）</text:span><text:span text:style-name="T5"/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 loext:marker-style-name="T33"><text:span text:style-name="T84">排序好的</text:span><text:span text:style-name="T36">陣列</text:span></text:p>
          </table:table-cell>
          <table:table-cell table:style-name="表格23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23.A2" office:value-type="string">
            <text:p text:style-name="P25" loext:marker-style-name="T33"><text:span text:style-name="T36">O(1) <text:s/>取快插慢</text:span><text:span text:style-name="T33"/></text:p>
          </table:table-cell>
        </table:table-row>
        <table:table-row table:style-name="表格23.1">
          <table:table-cell table:style-name="表格23.A2" office:value-type="string">
            <text:p text:style-name="P25" loext:marker-style-name="T33"><text:span text:style-name="T84">未排序的</text:span><text:span text:style-name="T36">陣列</text:span></text:p>
          </table:table-cell>
          <table:table-cell table:style-name="表格23.A2" office:value-type="string">
            <text:p text:style-name="P25" loext:marker-style-name="T33"><text:span text:style-name="T36">O(1)</text:span><text:span text:style-name="T33"/></text:p>
          </table:table-cell>
          <table:table-cell table:style-name="表格23.A2" office:value-type="string">
            <text:p text:style-name="P25" loext:marker-style-name="T33"><text:span text:style-name="T36">O(n) <text:s/>插快取慢</text:span><text:span text:style-name="T33"/></text:p>
          </table:table-cell>
        </table:table-row>
        <table:table-row table:style-name="表格23.1">
          <table:table-cell table:style-name="表格23.A4" office:value-type="string">
            <text:p text:style-name="P25" loext:marker-style-name="T33"><text:span text:style-name="T36">Max Heap ★</text:span><text:span text:style-name="T33"/></text:p>
          </table:table-cell>
          <table:table-cell table:style-name="表格23.A4" office:value-type="string">
            <text:p text:style-name="P15">O(log n)</text:p>
          </table:table-cell>
          <table:table-cell table:style-name="表格23.A4" office:value-type="string">
            <text:p text:style-name="P25" loext:marker-style-name="T33"><text:span text:style-name="T83">O(log n)</text:span><text:span text:style-name="T36"> <text:s/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33"><text:span text:style-name="T36">💡 考試重點：</text:span><text:span text:style-name="T33"/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59">Heap 是 Priority Queue 最常見的實作</text:span><text:span text:style-name="T36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原因是 </text:span><text:span text:style-name="T91">Insert 和 Extract 都是 O(log n)</text:span><text:span text:style-name="T36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是</text:span><text:span text:style-name="T103">三種方案中最均衡的折衷解</text:span><text:span text:style-name="T36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應用場景：印表機緩衝（高優先文件先印）、作業系統 CPU 排程。</text:span><text:span text:style-name="T33"/></text:p>
          </table:table-cell>
        </table:table-row>
      </table:table>
      <text:p text:style-name="P1"/>
      <text:p text:style-name="P1"/>
      <table:table table:name="圖解_六_PQ三種實作" table:style-name="圖解_5f_六_5f_PQ三種實作">
        <table:table-column table:style-name="圖解_5f_六_5f_PQ三種實作.A"/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① </text:span><text:span text:style-name="T84">排序好的</text:span><text:span text:style-name="T36">陣列（維持升冪）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需找到正確位置並挪動元素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10, 30, 70, 8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挪動 70, 80 後: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</text:span><text:span text:style-name="T39">50</text:span><text:span text:style-name="T36">, 70, 80] <text:s text:c="2"/>← </text:span><text:span text:style-name="T37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直接取末端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10, 30, 50, 70, 8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50, 70] <text:s text:c="2"/>取出 80 <text:s text:c="2"/>←</text:span><text:span text:style-name="T37"> 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② </text:span><text:span text:style-name="T84">未排序的</text:span><text:span text:style-name="T36">陣列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直接放末端，不管順序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80, 10, 30, 7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80, 10, 30, 70, 50] <text:s text:c="2"/>← </text:span><text:span text:style-name="T37">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ext:soft-page-break/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沒有順序，只能全部掃描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80, 10, 30, 70, 5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掃描: 80? 10? 30? 70? 50? <text:s/>→ 找到 80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70, 50] <text:s text:c="2"/>取出 80 <text:s text:c="2"/>← </text:span><text:span text:style-name="T37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③ Max Heap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放末端，Bubble Up 往上比較交換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80 <text:s text:c="16"/>8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/ <text:s/>\ <text:s text:c="15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"/>70 <text:s text:c="2"/>30 <text:s text:c="3"/>→ <text:s/>7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"/>/ <text:s text:c="18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4"/>10 <text:s text:c="14"/>10 <text:s text:c="2"/>50 ← </text:span><text:span text:style-name="T103">50 直接就合法，停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1"/></text:span><text:span text:style-name="T91">O(log 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</text:span><text:span text:style-name="T46">取出 Root=80</text:span><text:span text:style-name="T36">，</text:span><text:span text:style-name="T111">末端</text:span><text:span text:style-name="T36"> 50 </text:span><text:span text:style-name="T111">補位</text:span><text:span text:style-name="T36">，Heapify 往下交換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80 <text:s text:c="16"/>50 <text:s text:c="17"/>7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8"/>/ <text:s text:c="2"/>\ <text:s text:c="15"/>/ <text:s text:c="2"/>\ <text:s text:c="16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"/>70 <text:s text:c="2"/>30 <text:s text:c="2"/>→ <text:s text:c="3"/>70 <text:s text:c="2"/>30 <text:s text:c="3"/>→ <text:s text:c="3"/>5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"/>/ <text:s text:c="2"/>\ <text:s text:c="15"/>/ <text:s text:c="20"/>/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10 <text:s text:c="2"/>50 <text:s text:c="9"/>10 <text:s text:c="18"/>1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3"/>取出 80 <text:s text:c="5"/>50 移到 Root <text:s text:c="4"/>Heapify 完成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7"/></text:span><text:span text:style-name="T91">O(log n)</text:span></text:p>
          </table:table-cell>
        </table:table-row>
      </table:table>
      <text:p text:style-name="P1"/>
      <text:h text:style-name="P17" text:outline-level="1">七、Interval Heap（區間堆積）【110地Q4】</text:h>
      <text:h text:style-name="P19" text:outline-level="2">7-1 <text:s/>問題起源：<text:span text:style-name="T118">普通 Heap</text:span> <text:span text:style-name="T106">只能快速取一端</text:span></text:h>
      <text:p text:style-name="P31">回顧你已學過的 Max Heap：</text:p>
      <text:p text:style-name="P37"><text:s text:c="11"/>100 <text:s text:c="6"/>← <text:span text:style-name="T123">Root</text:span> = 全域最大值（<text:span text:style-name="T123">O(1) 取得</text:span>）</text:p>
      <text:p text:style-name="P11"><text:soft-page-break/><text:span text:style-name="T116"><text:s text:c="10"/>/ <text:s text:c="3"/>\</text:span></text:p>
      <text:p text:style-name="P38"><text:s text:c="8"/>90 <text:s text:c="5"/>80</text:p>
      <text:p text:style-name="P38"><text:s text:c="7"/>/ <text:s/>\</text:p>
      <text:p text:style-name="P38"><text:s text:c="6"/>70 <text:s text:c="2"/>60</text:p>
      <text:p text:style-name="P11"/>
      <text:p text:style-name="P38"><text:s text:c="2"/>Find-Max <text:s/>= O(1) <text:s/>直接<text:span text:style-name="T123">看 Root</text:span></text:p>
      <text:p text:style-name="P39"><text:s text:c="2"/><text:span text:style-name="T50">Find-Min <text:s/>= O(n)</text:span> <text:s/><text:span text:style-name="T127">最小值藏在某個葉節點，不知在哪，</text:span><text:span text:style-name="T112">只能全掃</text:span></text:p>
      <text:p text:style-name="P8"/>
      <text:p text:style-name="P31">Max Heap 有一個致命弱點：</text:p>
      <text:list text:style-name="WWNum2">
        <text:list-item>
          <text:p text:style-name="P22">取最大值 → O(1)，非常快，因為 Root 就是最大值。</text:p>
        </text:list-item>
        <text:list-item>
          <text:p text:style-name="P22"><text:span text:style-name="T51">取最小值 → O(n)</text:span>，<text:span text:style-name="T63">非常慢，因為最小值可能藏在任何一個葉節點，沒有規律可循。</text:span></text:p>
        </text:list-item>
      </text:list>
      <text:p text:style-name="P8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2">❓ 想一想：最小值在哪裡？</text:p>
            <text:p text:style-name="P34">以上面的 Max Heap 為例，最小值 60 藏在葉節點。</text:p>
            <text:p text:style-name="P35">如果樹有 n 個節點，不掃到最後一層根本不知道最小值在哪。</text:p>
          </table:table-cell>
        </table:table-row>
      </table:table>
      <text:p text:style-name="P12"/>
      <text:h text:style-name="P19" text:outline-level="2">7-2 <text:s/><text:span text:style-name="T118">現實需求</text:span>：<text:span text:style-name="T106">兩端都要快</text:span></text:h>
      <text:p text:style-name="P31">在<text:span text:style-name="T123">很多實際應用中</text:span>，我們<text:span text:style-name="T87">同時需要快速取出最大值和最小值</text:span>：</text:p>
      <text:p text:style-name="P8"/>
      <text:p text:style-name="P37"><text:s text:c="2"/>📈 股票交易系統：</text:p>
      <text:p text:style-name="P38"><text:s text:c="7"/>→ 最高價（最大值）O(1) 快速取得</text:p>
      <text:p text:style-name="P38"><text:s text:c="7"/>→ 最低價（最小值）O(1) 快速取得</text:p>
      <text:p text:style-name="P11"/>
      <text:p text:style-name="P38"><text:s text:c="2"/>🖥️ <text:s/>CPU 排程器（雙優先權模式）：</text:p>
      <text:p text:style-name="P38"><text:s text:c="7"/>→ 最高優先權工作 <text:s/>→ 優先執行</text:p>
      <text:p text:style-name="P38"><text:s text:c="7"/>→ 最低優先權工作 <text:s/>→ 必要時踢出讓位</text:p>
      <text:p text:style-name="P11"/>
      <text:p text:style-name="P38"><text:s text:c="2"/>❌ <text:span text:style-name="T123">普通 Max Heap</text:span> 做不到：<text:span text:style-name="T95">找最小值要</text:span><text:span text:style-name="T112"> O(n)</text:span></text:p>
      <text:p text:style-name="P39"><text:s text:c="2"/>❌ <text:span text:style-name="T123">普通 Min Heap</text:span> 做不到：<text:span text:style-name="T95">找最大值要</text:span><text:span text:style-name="T112"> O(n)</text:span></text:p>
      <text:p text:style-name="P8"/>
      <text:p text:style-name="P31">這類需求稱為 Double-Ended Priority Queue（DEPQ，<text:span text:style-name="T71">雙端優先佇列</text:span>），<text:span text:style-name="T63">目標是</text:span>：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2">Extract-Min（<text:span text:style-name="T106">取出最小值</text:span>）= <text:span text:style-name="T106">O(log n)</text:span></text:p>
            <text:p text:style-name="P33">Extract-Max（<text:span text:style-name="T106">取出最大值</text:span>）= <text:span text:style-name="T106">O(log n)</text:span></text:p>
          </table:table-cell>
        </table:table-row>
      </table:table>
      <text:p text:style-name="P12"/>
      <text:h text:style-name="P19" text:outline-level="2">7-3 <text:s/>Interval Heap 的核心設計</text:h>
      <text:p text:style-name="P31">Interval Heap 的靈感：把 Min Heap 和 Max Heap「疊」在同一棵樹上。</text:p>
      <text:p text:style-name="P31">具體做法：每個節點不再存一個值，改成存一個「區間」[min_val, max_val]：</text:p>
      <text:p text:style-name="P37"><text:s text:c="2"/>普通 Heap 節點： <text:s text:c="9"/>Interval Heap 節點：</text:p>
      <text:p text:style-name="P38"><text:s text:c="7"/>80 <text:s text:c="23"/>[20, 80]</text:p>
      <text:p text:style-name="P11"><text:soft-page-break/><text:span text:style-name="T116"><text:s text:c="34"/>左值 <text:s/>右值</text:span></text:p>
      <text:p text:style-name="P38"><text:s text:c="30"/>（小的） <text:s/>（大的）</text:p>
      <text:p text:style-name="P11"/>
      <text:p text:style-name="P39"><text:s text:c="2"/>規則：每個節點的 左值 ≤ 右值 （必須成立）</text:p>
      <text:p text:style-name="P8"/>
      <text:p text:style-name="P31">兩個 Heap 的同時維護：</text:p>
      <text:list text:continue-numbering="true" text:style-name="WWNum2">
        <text:list-item>
          <text:p text:style-name="P22">所有節點的左值（min 端）— 自上而下形成一個 Min Heap</text:p>
        </text:list-item>
        <text:list-item>
          <text:p text:style-name="P22">所有節點的右值（max 端）— 自上而下形成一個 Max Heap</text:p>
        </text:list-item>
      </text:list>
      <text:p text:style-name="P8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2">Interval Heap = Min Heap（左值）+ Max Heap（右值）同時疊在一棵樹上</text:p>
          </table:table-cell>
        </table:table-row>
      </table:table>
      <text:p text:style-name="P12"/>
      <text:h text:style-name="P19" text:outline-level="2">7-4 <text:s/>整棵樹的結構解析</text:h>
      <text:p text:style-name="P37"><text:s text:c="14"/>[10, 100] <text:s text:c="9"/>← Root</text:p>
      <text:p text:style-name="P38"><text:s text:c="13"/>/ <text:s text:c="9"/>\</text:p>
      <text:p text:style-name="P39"><text:s text:c="8"/>[20, 80] <text:s text:c="5"/>[30, 90]</text:p>
      <text:p text:style-name="P8"/>
      <text:p text:style-name="P31">拆開來看左右兩個 Heap：</text:p>
      <text:p text:style-name="P37"><text:s text:c="2"/>左值（min 端）形成 Min Heap： <text:s text:c="2"/>右值（max 端）形成 Max Heap：</text:p>
      <text:p text:style-name="P11"/>
      <text:p text:style-name="P38"><text:s text:c="10"/>10 <text:s text:c="30"/>100</text:p>
      <text:p text:style-name="P38"><text:s text:c="9"/>/ <text:s/>\ <text:s text:c="28"/>/ <text:s text:c="3"/>\</text:p>
      <text:p text:style-name="P38"><text:s text:c="8"/>20 <text:s/>30 <text:s text:c="26"/>80 <text:s text:c="4"/>90</text:p>
      <text:p text:style-name="P11"/>
      <text:p text:style-name="P39"><text:s text:c="2"/>驗證 Min Heap：10 ≤ 20 ✓ <text:s/>10 ≤ 30 ✓ <text:s text:c="2"/>驗證 Max Heap：100 ≥ 80 ✓ <text:s/>100 ≥ 90 ✓</text:p>
      <text:p text:style-name="P8"/>
      <text:p text:style-name="P31">因此：</text:p>
      <text:list text:continue-numbering="true" text:style-name="WWNum2">
        <text:list-item>
          <text:p text:style-name="P22">Root 的左值 = Min Heap 的 Root = 全域最小值 = 10 <text:s/>→ <text:s/>Find-Min = O(1)</text:p>
        </text:list-item>
        <text:list-item>
          <text:p text:style-name="P22">Root 的右值 = Max Heap 的 Root = 全域最大值 = 100 <text:s/>→ <text:s/>Find-Max = O(1)</text:p>
        </text:list-item>
      </text:list>
      <text:p text:style-name="P8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2">🎯 Interval Heap 的核心價值</text:p>
            <text:p text:style-name="P34">Root 節點同時持有全域最小值（左值）和全域最大值（右值），</text:p>
            <text:p text:style-name="P35">無論取哪一端，都能 O(1) 找到、O(log n) 取出。</text:p>
          </table:table-cell>
        </table:table-row>
      </table:table>
      <text:p text:style-name="P12"/>
      <text:h text:style-name="P19" text:outline-level="2">7-5 <text:s/>操作複雜度一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40">操作</text:p>
          </table:table-cell>
          <table:table-cell table:style-name="表格29.A1" office:value-type="string">
            <text:p text:style-name="P40">Interval Heap</text:p>
          </table:table-cell>
          <table:table-cell table:style-name="表格29.A1" office:value-type="string">
            <text:p text:style-name="P40">普通 Max Heap</text:p>
          </table:table-cell>
          <table:table-cell table:style-name="表格29.A1" office:value-type="string">
            <text:p text:style-name="P40">普通 Min Heap</text:p>
          </table:table-cell>
        </table:table-row>
        <table:table-row table:style-name="表格29.1">
          <table:table-cell table:style-name="表格29.A2" office:value-type="string">
            <text:p text:style-name="P36">Find-Min（找最小值）</text:p>
          </table:table-cell>
          <table:table-cell table:style-name="表格29.A2" office:value-type="string">
            <text:p text:style-name="P36">O(1) ★</text:p>
          </table:table-cell>
          <table:table-cell table:style-name="表格29.A2" office:value-type="string">
            <text:p text:style-name="P36">O(n)</text:p>
          </table:table-cell>
          <table:table-cell table:style-name="表格29.A2" office:value-type="string">
            <text:p text:style-name="P36">O(1)</text:p>
          </table:table-cell>
        </table:table-row>
        <table:table-row table:style-name="表格29.1">
          <table:table-cell table:style-name="表格29.A3" office:value-type="string">
            <text:p text:style-name="P36">Find-Max（找最大值）</text:p>
          </table:table-cell>
          <table:table-cell table:style-name="表格29.A3" office:value-type="string">
            <text:p text:style-name="P36">O(1) ★</text:p>
          </table:table-cell>
          <table:table-cell table:style-name="表格29.A3" office:value-type="string">
            <text:p text:style-name="P36">O(1)</text:p>
          </table:table-cell>
          <table:table-cell table:style-name="表格29.A3" office:value-type="string">
            <text:p text:style-name="P36">O(n)</text:p>
          </table:table-cell>
        </table:table-row>
        <text:soft-page-break/>
        <table:table-row table:style-name="表格29.1">
          <table:table-cell table:style-name="表格29.A2" office:value-type="string">
            <text:p text:style-name="P36">Extract-Min（取出最小）</text:p>
          </table:table-cell>
          <table:table-cell table:style-name="表格29.A2" office:value-type="string">
            <text:p text:style-name="P36">O(log n) ★</text:p>
          </table:table-cell>
          <table:table-cell table:style-name="表格29.A2" office:value-type="string">
            <text:p text:style-name="P36">O(n)</text:p>
          </table:table-cell>
          <table:table-cell table:style-name="表格29.A2" office:value-type="string">
            <text:p text:style-name="P36">O(log n)</text:p>
          </table:table-cell>
        </table:table-row>
        <table:table-row table:style-name="表格29.1">
          <table:table-cell table:style-name="表格29.A3" office:value-type="string">
            <text:p text:style-name="P36">Extract-Max（取出最大）</text:p>
          </table:table-cell>
          <table:table-cell table:style-name="表格29.A3" office:value-type="string">
            <text:p text:style-name="P36">O(log n) ★</text:p>
          </table:table-cell>
          <table:table-cell table:style-name="表格29.A3" office:value-type="string">
            <text:p text:style-name="P36">O(log n)</text:p>
          </table:table-cell>
          <table:table-cell table:style-name="表格29.A3" office:value-type="string">
            <text:p text:style-name="P36">O(n)</text:p>
          </table:table-cell>
        </table:table-row>
      </table:table>
      <text:p text:style-name="P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2">⚠️ <text:s/>普通 Min/Max Heap 各有盲點：</text:p>
            <text:p text:style-name="P34">普通 Max Heap 找最小值 → O(n)（要掃整棵樹）</text:p>
            <text:p text:style-name="P34">普通 Min Heap 找最大值 → O(n)（同理）</text:p>
            <text:p text:style-name="P35">Interval Heap 解決此問題，兩端操作都達到 O(log n)，這是其最大優勢。</text:p>
          </table:table-cell>
        </table:table-row>
      </table:table>
      <text:p text:style-name="P12"/>
      <text:h text:style-name="P19" text:outline-level="2">7-6 <text:s/>Insert 操作示範（插入 5）</text:h>
      <text:p text:style-name="P31">以下示範將數字 5 插入含 {10, 100}, {20, 80}, {30, 90} 的 Interval Heap：</text:p>
      <text:p text:style-name="P37">初始： <text:s text:c="10"/>[10, 100]</text:p>
      <text:p text:style-name="P38"><text:s text:c="18"/>/ <text:s text:c="7"/>\</text:p>
      <text:p text:style-name="P38"><text:s text:c="13"/>[20, 80] <text:s text:c="2"/>[30, 90]</text:p>
      <text:p text:style-name="P11"/>
      <text:p text:style-name="P38">Step 1：新葉 [5, 5] 接在 [20, 80] 左子位置</text:p>
      <text:p text:style-name="P38"><text:s text:c="13"/>[10, 100]</text:p>
      <text:p text:style-name="P38"><text:s text:c="14"/>/ <text:s text:c="7"/>\</text:p>
      <text:p text:style-name="P38"><text:s text:c="9"/>[20, 80] <text:s text:c="2"/>[30, 90]</text:p>
      <text:p text:style-name="P38"><text:s text:c="14"/>/</text:p>
      <text:p text:style-name="P38"><text:s text:c="11"/>[5, 5] <text:s text:c="2"/>← 5 &lt; parent.min(20)，min 端需上浮</text:p>
      <text:p text:style-name="P11"/>
      <text:p text:style-name="P38">Step 2：交換 min 端 → [20,80]→[5,80]，葉→[20,20]</text:p>
      <text:p text:style-name="P38"><text:s text:c="13"/>[10, 100]</text:p>
      <text:p text:style-name="P38"><text:s text:c="14"/>/ <text:s text:c="7"/>\</text:p>
      <text:p text:style-name="P38"><text:s text:c="10"/>[5, 80] <text:s text:c="2"/>[30, 90] <text:s text:c="2"/>← 5 &lt; Root.min(10)，繼續上浮</text:p>
      <text:p text:style-name="P38"><text:s text:c="14"/>/</text:p>
      <text:p text:style-name="P38"><text:s text:c="10"/>[20, 20]</text:p>
      <text:p text:style-name="P11"/>
      <text:p text:style-name="P38">Step 3：交換 min 端 → Root[10,100]→[5,100]，[5,80]→[10,80]</text:p>
      <text:p text:style-name="P11"/>
      <text:p text:style-name="P38">最終： <text:s text:c="10"/>[5, 100] <text:s text:c="2"/>← 全域最小值已更新</text:p>
      <text:p text:style-name="P38"><text:s text:c="18"/>/ <text:s text:c="7"/>\</text:p>
      <text:p text:style-name="P38"><text:s text:c="13"/>[10, 80] <text:s text:c="2"/>[30, 90]</text:p>
      <text:p text:style-name="P38"><text:s text:c="18"/>/</text:p>
      <text:p text:style-name="P39"><text:s text:c="13"/>[20, 20]</text:p>
      <text:p text:style-name="P8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2">Insert 規則：</text:p>
            <text:p text:style-name="P34">新值 &lt; 父節點左值（min）→ 交換左值，繼續往上（min 端上浮）</text:p>
            <text:p text:style-name="P34">新值 &gt; 父節點右值（max）→ 交換右值，繼續往上（max 端上浮）</text:p>
            <text:p text:style-name="P35">新值介於父節點 [min, max] 之間 → 合法，停止</text:p>
          </table:table-cell>
        </table:table-row>
      </table:table>
      <text:h text:style-name="P6" text:outline-level="1"><text:soft-page-break/><text:span text:style-name="T115">八、合併兩個 Heap（Merge Heap）【111地Q4】</text:span></text:h>
      <text:h text:style-name="P19" text:outline-level="2">8-1 <text:s/>問題起源：普通 Heap 合併需要 O(n+m)</text:h>
      <text:p text:style-name="P31">假設現在有兩個 Max Heap A 和 B，你想把它們合併成一個新的 Max Heap：</text:p>
      <text:p text:style-name="P37"><text:s text:c="2"/>Heap A： <text:s text:c="9"/>Heap B： <text:s text:c="9"/>合併目標：</text:p>
      <text:p text:style-name="P38"><text:s text:c="7"/>90 <text:s text:c="15"/>95 <text:s text:c="16"/>95</text:p>
      <text:p text:style-name="P38"><text:s text:c="6"/>/ <text:s/>\ <text:s text:c="13"/>/ <text:s/>\ <text:s text:c="14"/>/ <text:s text:c="3"/>\</text:p>
      <text:p text:style-name="P38"><text:s text:c="5"/>70 <text:s text:c="2"/>80 <text:s text:c="10"/>60 <text:s text:c="2"/>50 <text:s text:c="10"/>90 <text:s text:c="5"/>80</text:p>
      <text:p text:style-name="P38"><text:s text:c="40"/>/ <text:s/>\ <text:s text:c="2"/>/</text:p>
      <text:p text:style-name="P39"><text:s text:c="39"/>70 <text:s/>60 50</text:p>
      <text:p text:style-name="P8"/>
      <text:p text:style-name="P31">普通 Binary Heap 沒有高效的合併方法，通常只能：</text:p>
      <text:list text:continue-numbering="true" text:style-name="WWNum2">
        <text:list-item>
          <text:p text:style-name="P22">方法：把 A 和 B 的所有元素倒出來，重新執行 Bottom-Up Build Heap。</text:p>
        </text:list-item>
        <text:list-item>
          <text:p text:style-name="P22">代價：O(n+m)，n 和 m 是兩個 Heap 的大小。</text:p>
        </text:list-item>
      </text:list>
      <text:p text:style-name="P8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32">❓ O(n+m) 有什麼問題？</text:p>
            <text:p text:style-name="P34">對單次合併來說 O(n+m) 尚可接受，但有些系統一天要合併幾十萬次：</text:p>
            <text:p text:style-name="P34"><text:s text:c="2"/>• Event-driven Simulation（事件驅動模擬）</text:p>
            <text:p text:style-name="P34"><text:s text:c="2"/>• 作業系統排程器（Scheduler）</text:p>
            <text:p text:style-name="P35"><text:s text:c="2"/>• 分散式工作佇列（Distributed Job Queue）</text:p>
          </table:table-cell>
        </table:table-row>
      </table:table>
      <text:p text:style-name="P12"/>
      <text:h text:style-name="P19" text:outline-level="2">8-2 <text:s/>解決方案：把右側路徑弄得很短</text:h>
      <text:p text:style-name="P31">發明者的想法很直接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2">Merge 只沿右側路徑（right path）遞迴進行。</text:p>
            <text:p text:style-name="P34">如果右側路徑很短 → Merge 就很快。</text:p>
            <text:p text:style-name="P35">因此：故意把樹弄歪，讓右側路徑保持極短。</text:p>
          </table:table-cell>
        </table:table-row>
      </table:table>
      <text:p text:style-name="P8"/>
      <text:p text:style-name="P37"><text:s text:c="2"/>普通 Heap（平衡）： <text:s text:c="11"/>Leftist Heap（故意偏左）：</text:p>
      <text:p text:style-name="P38"><text:s text:c="8"/>90 <text:s text:c="29"/>90</text:p>
      <text:p text:style-name="P38"><text:s text:c="7"/>/ <text:s/>\ <text:s text:c="27"/>/</text:p>
      <text:p text:style-name="P38"><text:s text:c="6"/>80 <text:s text:c="2"/>70 <text:s text:c="24"/>80</text:p>
      <text:p text:style-name="P38"><text:s text:c="5"/>/ \ / \ <text:s text:c="24"/>/</text:p>
      <text:p text:style-name="P38"><text:s text:c="4"/>60 50 40 30 <text:s text:c="21"/>70</text:p>
      <text:p text:style-name="P38"><text:s text:c="36"/>/</text:p>
      <text:p text:style-name="P38"><text:s text:c="35"/>60</text:p>
      <text:p text:style-name="P11"/>
      <text:p text:style-name="P39"><text:s text:c="2"/>左右差不多，Merge 要走很深 <text:s text:c="5"/>右側路徑只有 1 步！Merge 超快</text:p>
      <text:p text:style-name="P12"/>
      <text:h text:style-name="P7" text:outline-level="2"><text:soft-page-break/><text:span text:style-name="T17">8-3 <text:s/>NPL（Null Path Length，空路徑長度）</text:span></text:h>
      <text:p text:style-name="P31">NPL 是「量化右側有多短」的工具。直觀理解：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32">NPL(node) = 從該節點出發，走到最近的空節點（null）所需的步數</text:p>
            <text:p text:style-name="P35">NPL(null) = -1 <text:s/>（空節點本身的定義）</text:p>
          </table:table-cell>
        </table:table-row>
      </table:table>
      <text:p text:style-name="P8"/>
      <text:p text:style-name="P31">公式：NPL(node) = 1 + min( NPL(左子), NPL(右子) )</text:p>
      <text:p text:style-name="P8"/>
      <text:p text:style-name="P41">NPL 計算範例</text:p>
      <text:p text:style-name="P37"><text:s text:c="14"/>3 <text:s text:c="11"/>← 算 NPL</text:p>
      <text:p text:style-name="P38"><text:s text:c="13"/>/ \</text:p>
      <text:p text:style-name="P38"><text:s text:c="12"/>5 <text:s text:c="2"/>8</text:p>
      <text:p text:style-name="P38"><text:s text:c="11"/>/ \</text:p>
      <text:p text:style-name="P38"><text:s text:c="10"/>9 <text:s text:c="2"/>7</text:p>
      <text:p text:style-name="P11"/>
      <text:p text:style-name="P38"><text:s text:c="2"/>計算（由葉往根）：</text:p>
      <text:p text:style-name="P38"><text:s text:c="4"/>NPL(9) = 1 + min(-1,-1) = 0 <text:s text:c="2"/>（葉節點，兩側皆空）</text:p>
      <text:p text:style-name="P38"><text:s text:c="4"/>NPL(7) = 0 <text:s text:c="20"/>（同上）</text:p>
      <text:p text:style-name="P38"><text:s text:c="4"/>NPL(8) = 0 <text:s text:c="20"/>（葉節點）</text:p>
      <text:p text:style-name="P38"><text:s text:c="4"/>NPL(5) = 1 + min(NPL(9),NPL(7)) = 1+min(0,0) = 1</text:p>
      <text:p text:style-name="P39"><text:s text:c="4"/>NPL(3) = 1 + min(NPL(5),NPL(8)) = 1+min(1,0) = 1</text:p>
      <text:p text:style-name="P12"/>
      <text:h text:style-name="P19" text:outline-level="2">8-4 <text:s/>左偏性質（Leftist Property）</text:h>
      <text:p text:style-name="P31">Leftist Heap 對每個節點加一條規定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2">每個節點：NPL（左子樹）≥ NPL（右子樹）</text:p>
            <text:p text:style-name="P35">意思：左邊一定比右邊「深」或「一樣深」→ 右側路徑一定是最短路徑。</text:p>
          </table:table-cell>
        </table:table-row>
      </table:table>
      <text:p text:style-name="P8"/>
      <text:p text:style-name="P31">這個規定保證了：</text:p>
      <text:list text:continue-numbering="true" text:style-name="WWNum2">
        <text:list-item>
          <text:p text:style-name="P22">右側路徑長度 ≤ log(n+1) <text:s/>（即使整棵樹有 n 個節點，右路徑也不超過 log n 步）</text:p>
        </text:list-item>
        <text:list-item>
          <text:p text:style-name="P22">Merge 沿右路徑進行 → 深度 ≤ log n → 時間 O(log n)</text:p>
        </text:list-item>
      </text:list>
      <text:p text:style-name="P8"/>
      <text:p text:style-name="P41">上面範例的左偏驗證</text:p>
      <text:p text:style-name="P37"><text:s text:c="2"/>節點 3：NPL(左=5) = 1 <text:s/>≥ <text:s/>NPL(右=8) = 0 <text:s text:c="2"/>✓ 左偏</text:p>
      <text:p text:style-name="P38"><text:s text:c="2"/>節點 5：NPL(左=9) = 0 <text:s/>≥ <text:s/>NPL(右=7) = 0 <text:s text:c="2"/>✓ 左偏（相等也算）</text:p>
      <text:p text:style-name="P11"/>
      <text:p text:style-name="P39">→ 此樹是合法的 Min Leftist Heap ✓</text:p>
      <text:p text:style-name="P12"/>
      <text:h text:style-name="P7" text:outline-level="2"><text:soft-page-break/><text:span text:style-name="T17">8-5 <text:s/>Merge 演算法（以 Min Leftist Heap 為例）</text:span></text:h>
      <text:p text:style-name="P31">只有四個步驟，每次都沿右側路徑遞迴：</text:p>
      <text:p text:style-name="P37"><text:s text:c="2"/>Step 1：比較 A 和 B 的 Root</text:p>
      <text:p text:style-name="P38"><text:s text:c="11"/>→ 較小的 Root 成為新 Root（Min Heap）</text:p>
      <text:p text:style-name="P38"><text:s text:c="11"/>→ 較大的 Root 成為另一個子樹（稱為 b）</text:p>
      <text:p text:style-name="P11"/>
      <text:p text:style-name="P38"><text:s text:c="2"/>Step 2：遞迴合併「新 Root 的右子樹」與「b」</text:p>
      <text:p text:style-name="P38"><text:s text:c="11"/>→ Merge(newRoot.right, b)</text:p>
      <text:p text:style-name="P11"/>
      <text:p text:style-name="P38"><text:s text:c="2"/>Step 3：合併完後，若 NPL(右子樹) &gt; NPL(左子樹)</text:p>
      <text:p text:style-name="P38"><text:s text:c="11"/>→ 交換左右子樹，恢復左偏性質</text:p>
      <text:p text:style-name="P11"/>
      <text:p text:style-name="P39"><text:s text:c="2"/>Step 4：更新 NPL 值</text:p>
      <text:p text:style-name="P8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32">為什麼只走右側路徑？</text:p>
            <text:p text:style-name="P34">Merge 每次遞迴都只取「右子樹」→ 路徑深度 = 右側路徑長度 ≤ log n。</text:p>
            <text:p text:style-name="P35">左側路徑完全不碰，保持不變。</text:p>
          </table:table-cell>
        </table:table-row>
      </table:table>
      <text:p text:style-name="P12"/>
      <text:h text:style-name="P19" text:outline-level="2">8-6 <text:s/>Merge 完整範例</text:h>
      <text:p text:style-name="P37"><text:s text:c="2"/>Heap A（NPL=1）： <text:s text:c="5"/>Heap B（NPL=1）：</text:p>
      <text:p text:style-name="P38"><text:s text:c="10"/>3 <text:s text:c="21"/>6</text:p>
      <text:p text:style-name="P38"><text:s text:c="9"/>/ \ <text:s text:c="18"/>/ \</text:p>
      <text:p text:style-name="P38"><text:s text:c="8"/>5 <text:s text:c="2"/>8 <text:s text:c="15"/>12 <text:s text:c="2"/>7</text:p>
      <text:p text:style-name="P11"/>
      <text:p text:style-name="P38"><text:s text:c="2"/>Step 1：3 &lt; 6 → 3 為新 Root，遞迴 Merge(A.right=8, B=6)</text:p>
      <text:p text:style-name="P11"/>
      <text:p text:style-name="P38"><text:s text:c="2"/>Step 2：Merge(8, 6)：6 &lt; 8 → 6 為新 Root，遞迴 Merge(B.right=7, 8)</text:p>
      <text:p text:style-name="P11"/>
      <text:p text:style-name="P38"><text:s text:c="2"/>Step 3：Merge(7, 8)：7 &lt; 8 → 7 為新 Root</text:p>
      <text:p text:style-name="P38"><text:s text:c="11"/>Merge(null, 8) = 8 <text:s/>→ <text:s/>7.right = 8</text:p>
      <text:p text:style-name="P38"><text:s text:c="11"/>NPL(7.left=null)=-1 &lt; NPL(7.right=8)=0 <text:s/>→ <text:s/>交換左右！</text:p>
      <text:p text:style-name="P38"><text:s text:c="11"/>結果：7.left=8, 7.right=null, NPL(7)=0</text:p>
      <text:p text:style-name="P38"><text:s text:c="20"/>7</text:p>
      <text:p text:style-name="P38"><text:s text:c="19"/>/</text:p>
      <text:p text:style-name="P38"><text:s text:c="18"/>8</text:p>
      <text:p text:style-name="P11"/>
      <text:p text:style-name="P38"><text:s text:c="2"/>Step 4：回填 Merge(8,6)：6.left=12, 6.right=7</text:p>
      <text:p text:style-name="P38"><text:s text:c="11"/>NPL(12)=0 = NPL(7)=0 <text:s/>→ <text:s/>不需交換</text:p>
      <text:p text:style-name="P38"><text:s text:c="11"/>NPL(6) = min(0,0)+1 = 1</text:p>
      <text:p text:style-name="P38"><text:s text:c="20"/>6 <text:s/>[NPL=1]</text:p>
      <text:p text:style-name="P38"><text:s text:c="19"/>/ \</text:p>
      <text:p text:style-name="P38"><text:s text:c="17"/>12 <text:s text:c="2"/>7</text:p>
      <text:p text:style-name="P38"><text:s text:c="21"/>/</text:p>
      <text:p text:style-name="P38"><text:s text:c="20"/>8</text:p>
      <text:p text:style-name="P11"/>
      <text:p text:style-name="P38"><text:s text:c="2"/>Step 5：回填 Merge(A,B)：3.left=5, 3.right=6</text:p>
      <text:p text:style-name="P38"><text:s text:c="11"/>NPL(3.right=6)=1 &gt; NPL(3.left=5)=0 <text:s/>→ <text:s/>交換左右！</text:p>
      <text:p text:style-name="P39"><text:s text:c="11"/>NPL(3) = min(NPL(6),NPL(5))+1 = min(1,0)+1 = 1</text:p>
      <text:p text:style-name="P13"/>
      <text:p text:style-name="P10"><text:soft-page-break/><text:span text:style-name="T116"><text:s text:c="2"/>最終合併結果（Min Leftist Heap）：</text:span></text:p>
      <text:p text:style-name="P11"/>
      <text:p text:style-name="P38"><text:s text:c="14"/>3 <text:s/>[NPL=1]</text:p>
      <text:p text:style-name="P38"><text:s text:c="13"/>/ \</text:p>
      <text:p text:style-name="P38"><text:s text:c="12"/>6 <text:s text:c="2"/>5 <text:s/>[NPL=0]</text:p>
      <text:p text:style-name="P38"><text:s text:c="11"/>/ \</text:p>
      <text:p text:style-name="P38"><text:s text:c="9"/>12 <text:s text:c="2"/>7 <text:s/>[NPL=0]</text:p>
      <text:p text:style-name="P38"><text:s text:c="13"/>/</text:p>
      <text:p text:style-name="P38"><text:s text:c="12"/>8</text:p>
      <text:p text:style-name="P11"/>
      <text:p text:style-name="P38"><text:s text:c="2"/>驗證 Min Heap：3&lt;6 ✓ <text:s/>3&lt;5 ✓ <text:s/>6&lt;12 ✓ <text:s/>6&lt;7 ✓ <text:s/>7&lt;8 ✓</text:p>
      <text:p text:style-name="P39"><text:s text:c="2"/>驗證左偏性：NPL(6)=1 ≥ NPL(5)=0 ✓ <text:s/>NPL(12)=0 ≥ NPL(7)=0 ✓</text:p>
      <text:p text:style-name="P12"/>
      <text:h text:style-name="P19" text:outline-level="2">8-7 <text:s/>時間複雜度與重點整理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row table:style-name="表格45.1">
          <table:table-cell table:style-name="表格45.A1" office:value-type="string">
            <text:p text:style-name="P40">操作</text:p>
          </table:table-cell>
          <table:table-cell table:style-name="表格45.A1" office:value-type="string">
            <text:p text:style-name="P40">普通 Binary Heap</text:p>
          </table:table-cell>
          <table:table-cell table:style-name="表格45.A1" office:value-type="string">
            <text:p text:style-name="P40">Leftist Heap</text:p>
          </table:table-cell>
        </table:table-row>
        <table:table-row table:style-name="表格45.1">
          <table:table-cell table:style-name="表格45.A2" office:value-type="string">
            <text:p text:style-name="P36">Insert</text:p>
          </table:table-cell>
          <table:table-cell table:style-name="表格45.A2" office:value-type="string">
            <text:p text:style-name="P36">O(log n)</text:p>
          </table:table-cell>
          <table:table-cell table:style-name="表格45.A2" office:value-type="string">
            <text:p text:style-name="P36">O(log n)</text:p>
          </table:table-cell>
        </table:table-row>
        <table:table-row table:style-name="表格45.1">
          <table:table-cell table:style-name="表格45.A3" office:value-type="string">
            <text:p text:style-name="P36">Extract-Min/Max</text:p>
          </table:table-cell>
          <table:table-cell table:style-name="表格45.A3" office:value-type="string">
            <text:p text:style-name="P36">O(log n)</text:p>
          </table:table-cell>
          <table:table-cell table:style-name="表格45.A3" office:value-type="string">
            <text:p text:style-name="P36">O(log n)</text:p>
          </table:table-cell>
        </table:table-row>
        <table:table-row table:style-name="表格45.1">
          <table:table-cell table:style-name="表格45.A2" office:value-type="string">
            <text:p text:style-name="P36">Merge（合併兩個 Heap）</text:p>
          </table:table-cell>
          <table:table-cell table:style-name="表格45.A2" office:value-type="string">
            <text:p text:style-name="P36">O(n+m) 重建</text:p>
          </table:table-cell>
          <table:table-cell table:style-name="表格45.A2" office:value-type="string">
            <text:p text:style-name="P36">O(log n + log m) ★</text:p>
          </table:table-cell>
        </table:table-row>
      </table:table>
      <text:p text:style-name="P9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32">⚠️ <text:s/>重要：Min vs. Max Leftist Heap</text:p>
            <text:p text:style-name="P34">Min Leftist Heap → Merge 時，較小的 Root 成為新 Root</text:p>
            <text:p text:style-name="P34">Max Leftist Heap → Merge 時，較大的 Root 成為新 Root</text:p>
            <text:p text:style-name="P35">演算法步驟完全相同，只有「誰當新 Root」的比較方向相反。</text:p>
          </table:table-cell>
        </table:table-row>
      </table:table>
      <text:h text:style-name="P17" text:outline-level="1"/>
      <text:p text:style-name="P1"/>
      <text:h text:style-name="P16" text:outline-level="1" loext:marker-style-name="T3"><text:span text:style-name="T4">九、</text:span><text:span text:style-name="T3">Heap</text:span><text:span text:style-name="T4"> vs. </text:span><text:span text:style-name="T3">BST / AVL / Red-Black Tree</text:span><text:span text:style-name="T4"> 深度比較</text:span></text:h>
      <text:p text:style-name="P26" loext:marker-style-name="T20"><text:span text:style-name="T21">這是許多考生最容易混淆的地方，必須徹底釐清各資料結構的設計目的。</text:span><text:span text:style-name="T20"/></text:p>
      <text:p text:style-name="P1"/>
      <text:h text:style-name="P18" text:outline-level="2" loext:marker-style-name="T14"><text:span text:style-name="T15">各結構設計目的一覽</text:span><text:span text:style-name="T14"/></text:h>
      <text:p text:style-name="P1"/>
      <table:table table:name="表格31" table:style-name="表格31">
        <table:table-column table:style-name="表格31.A" table:number-columns-repeated="2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25" loext:marker-style-name="T5"><text:span text:style-name="T6">結構</text:span><text:span text:style-name="T5"/></text:p>
            </table:table-cell>
            <table:table-cell table:style-name="表格31.A1" office:value-type="string">
              <text:p text:style-name="P25" loext:marker-style-name="T5"><text:span text:style-name="T6">設計目的</text:span><text:span text:style-name="T5"/></text:p>
            </table:table-cell>
            <table:table-cell table:style-name="表格31.A1" office:value-type="string">
              <text:p text:style-name="P25" loext:marker-style-name="T5"><text:span text:style-name="T6">核心保證</text:span><text:span text:style-name="T5"/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5" loext:marker-style-name="T33"><text:span text:style-name="T36">BST</text:span><text:span text:style-name="T33"/></text:p>
          </table:table-cell>
          <table:table-cell table:style-name="表格31.A2" office:value-type="string">
            <text:p text:style-name="P25" loext:marker-style-name="T33"><text:span text:style-name="T36">快速搜尋特定值</text:span><text:span text:style-name="T33"/></text:p>
          </table:table-cell>
          <table:table-cell table:style-name="表格31.A2" office:value-type="string">
            <text:p text:style-name="P25" loext:marker-style-name="T33"><text:span text:style-name="T36">左 &lt; 根 &lt; 右</text:span><text:span text:style-name="T33"/></text:p>
          </table:table-cell>
        </table:table-row>
        <table:table-row table:style-name="表格31.1">
          <table:table-cell table:style-name="表格31.A2" office:value-type="string">
            <text:p text:style-name="P25" loext:marker-style-name="T33"><text:span text:style-name="T36">AVL Tree</text:span><text:span text:style-name="T33"/></text:p>
          </table:table-cell>
          <table:table-cell table:style-name="表格31.A2" office:value-type="string">
            <text:p text:style-name="P25" loext:marker-style-name="T33"><text:span text:style-name="T36">平衡 BST，穩定搜尋</text:span><text:span text:style-name="T33"/></text:p>
          </table:table-cell>
          <table:table-cell table:style-name="表格31.A2" office:value-type="string">
            <text:p text:style-name="P25" loext:marker-style-name="T33"><text:span text:style-name="T36">高度差 ≤ 1，h = O(log n)</text:span><text:span text:style-name="T33"/></text:p>
          </table:table-cell>
        </table:table-row>
        <table:table-row table:style-name="表格31.1">
          <table:table-cell table:style-name="表格31.A2" office:value-type="string">
            <text:p text:style-name="P25" loext:marker-style-name="T33"><text:span text:style-name="T36">Red-Black Tree</text:span><text:span text:style-name="T33"/></text:p>
          </table:table-cell>
          <table:table-cell table:style-name="表格31.A2" office:value-type="string">
            <text:p text:style-name="P25" loext:marker-style-name="T33"><text:span text:style-name="T36">平衡 BST，減少旋轉</text:span><text:span text:style-name="T33"/></text:p>
          </table:table-cell>
          <table:table-cell table:style-name="表格31.A2" office:value-type="string">
            <text:p text:style-name="P25" loext:marker-style-name="T33"><text:span text:style-name="T36">顏色規則，h = O(log n)</text:span><text:span text:style-name="T33"/>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25" loext:marker-style-name="T33"><text:span text:style-name="T36">Heap</text:span><text:span text:style-name="T33"/></text:p>
          </table:table-cell>
          <table:table-cell table:style-name="表格31.A2" office:value-type="string">
            <text:p text:style-name="P25" loext:marker-style-name="T33"><text:span text:style-name="T36">快速取最大/最小值</text:span><text:span text:style-name="T33"/></text:p>
          </table:table-cell>
          <table:table-cell table:style-name="表格31.A2" office:value-type="string">
            <text:p text:style-name="P25" loext:marker-style-name="T33"><text:span text:style-name="T36">父 ≥ 子（Max）或父 ≤ 子（Min）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時間複雜度全比較</text:span><text:span text:style-name="T14"/></text:h>
      <text:p text:style-name="P1"/>
      <table:table table:name="表格32" table:style-name="表格32">
        <table:table-column table:style-name="表格32.A" table:number-columns-repeated="4"/>
        <table:table-header-rows>
          <table:table-row table:style-name="表格32.1">
            <table:table-cell table:style-name="表格32.A1" office:value-type="string">
              <text:p text:style-name="P25" loext:marker-style-name="T5"><text:span text:style-name="T11">操作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BST（平衡）/ AVL / RB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Heap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說明</text:span><text:span text:style-name="T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5" loext:marker-style-name="T33"><text:span text:style-name="T36">搜尋特定值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❌ O(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Heap 無排序規則</text:span><text:span text:style-name="T33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33"><text:span text:style-name="T36">找最大值（view）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✅ O(1)</text:span><text:span text:style-name="T33"/></text:p>
          </table:table-cell>
          <table:table-cell table:style-name="表格32.A3" office:value-type="string">
            <text:p text:style-name="P25" loext:marker-style-name="T33"><text:span text:style-name="T36">Heap Root 即最大值</text:span><text:span text:style-name="T33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33"><text:span text:style-name="T36">Extract-Max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相同</text:span><text:span text:style-name="T33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33"><text:span text:style-name="T36">Insert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相同</text:span><text:span text:style-name="T33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33"><text:span text:style-name="T36">Delete 任意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n) 找 + O(log n) 刪</text:span><text:span text:style-name="T33"/></text:p>
          </table:table-cell>
          <table:table-cell table:style-name="表格32.A2" office:value-type="string">
            <text:p text:style-name="P25" loext:marker-style-name="T33"><text:span text:style-name="T36">Heap 找到要刪的節點要 O(n)</text:span><text:span text:style-name="T33"/></text:p>
          </table:table-cell>
        </table:table-row>
      </table:table>
      <text:p text:style-name="P1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33"><text:span text:style-name="T36">⚠️ <text:s/>公職超高頻陷阱題：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「Max Heap 搜尋某元素的時間複雜度為何？」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❌ 錯誤答案：O(log n) <text:s/>← 看到樹就聯想 log n 是常見誤區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✅ 正確答案：O(n)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原因：Heap 只保證「父 ≥ 子」，無法判斷目標在左或右子樹，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<text:s text:c="6"/>最壞情況需掃描所有節點。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為什麼 </text:span><text:span text:style-name="T14">Linux</text:span><text:span text:style-name="T15"> 選擇 </text:span><text:span text:style-name="T14">Red-Black Tree</text:span><text:span text:style-name="T15"> 而非 </text:span><text:span text:style-name="T14">AVL</text:span><text:span text:style-name="T15">？</text:span></text:h>
      <text:list text:continue-list="list2707033212" text:style-name="WWNum1">
        <text:list-item>
          <text:p text:style-name="P30" loext:marker-style-name="T20"><text:span text:style-name="T21">AVL：搜尋最快，但插入/刪除旋轉次數多，修改成本高。</text:span><text:span text:style-name="T20"/></text:p>
        </text:list-item>
        <text:list-item>
          <text:p text:style-name="P30" loext:marker-style-name="T20"><text:span text:style-name="T21">Red-Black Tree：搜尋稍慢，但插入/刪除旋轉較少，整體效能均衡。</text:span><text:span text:style-name="T20"/></text:p>
        </text:list-item>
        <text:list-item>
          <text:p text:style-name="P30" loext:marker-style-name="T20"><text:span text:style-name="T21">Linux Kernel 的 CFS 排程器、記憶體管理（VMA）、Timer 均採用 Red-Black Tree。</text:span><text:span text:style-name="T20"/></text:p>
        </text:list-item>
      </text:list>
      <text:p text:style-name="P1"/>
      <text:p text:style-name="P1"/>
      <text:h text:style-name="P16" text:outline-level="1" loext:marker-style-name="T3"><text:span text:style-name="T4">十、公職考試常見陷阱整理</text:span><text:span text:style-name="T3"/></text:h>
      <text:p text:style-name="P1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33"><text:span text:style-name="T36">陷阱 1：Heap 搜尋 ≠ O(log n)，正確為 O(n)。</text:span><text:span text:style-name="T33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2：Build Heap ≠ O(n log n)，Bottom-Up 法正確為 O(n)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3：Heap 是 Complete Binary Tree，不是 Full Binary Tree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4：陣列索引從 1 開始，parent = ⌊i/2⌋（整數除法）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5：Interval Heap 每個節點存的是區間 [min, max]，不是單一值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6：Merge Leftist Heap 的新 Root 是兩個 Root 中較小的（Min Heap），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<text:s text:c="8"/>Max Leftist Heap 則是較大的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7：Heap Sort 是 Unstable Sort（不穩定排序）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8：Heap Sort 空間複雜度是 O(1)（In-place），不需額外空間。</text:span><text:span text:style-name="T33"/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4"><text:span text:style-name="T15">核心定義</text:span><text:span text:style-name="T1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33"><text:span text:style-name="T36">Heap = Complete Binary Tree + Heap Property（parent ≤/≥ child）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陣列索引（從 1 起）：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Root <text:s text:c="4"/>= A[1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Parent(i) = A[⌊i/2⌋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Left(i) <text:s/>= A[2i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Right(i) = A[2i+1]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時間複雜度速查</text:span><text:span text:style-name="T14"/></text:h>
      <text:p text:style-name="P1"/>
      <table:table table:name="表格36" table:style-name="表格36">
        <table:table-column table:style-name="表格36.A"/>
        <table:table-column table:style-name="表格36.B"/>
        <table:table-column table:style-name="表格36.C"/>
        <table:table-header-rows>
          <text:soft-page-break/>
          <table:table-row table:style-name="表格36.1">
            <table:table-cell table:style-name="表格36.A1" office:value-type="string">
              <text:p text:style-name="P25" loext:marker-style-name="T5"><text:span text:style-name="T6">操作</text:span><text:span text:style-name="T5"/></text:p>
            </table:table-cell>
            <table:table-cell table:style-name="表格36.A1" office:value-type="string">
              <text:p text:style-name="P25" loext:marker-style-name="T5"><text:span text:style-name="T6">時間複雜度</text:span><text:span text:style-name="T5"/></text:p>
            </table:table-cell>
            <table:table-cell table:style-name="表格36.A1" office:value-type="string">
              <text:p text:style-name="P25" loext:marker-style-name="T5"><text:span text:style-name="T6">原因</text:span><text:span text:style-name="T5"/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5" loext:marker-style-name="T33"><text:span text:style-name="T36">Insert（Bubble Up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最多走 h = log n 層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Extract-Max（Heapify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最多走 h = log n 層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Build Heap（Bottom-Up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 ★</text:span><text:span text:style-name="T33"/></text:p>
          </table:table-cell>
          <table:table-cell table:style-name="表格36.A2" office:value-type="string">
            <text:p text:style-name="P25" loext:marker-style-name="T33"><text:span text:style-name="T36">Floyd 演算法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逐個 Insert 建 Heap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 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n 次 × O(log n)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Heap Sort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 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 + O(n log n)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搜尋特定值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無左右排序規則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Merge (Leftist Heap)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 + log m)</text:span><text:span text:style-name="T33"/></text:p>
          </table:table-cell>
          <table:table-cell table:style-name="表格36.A2" office:value-type="string">
            <text:p text:style-name="P25" loext:marker-style-name="T33"><text:span text:style-name="T36">右側路徑短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Priority Queue 三種實作比較</text:span><text:span text:style-name="T14"/></text:h>
      <text:p text:style-name="P1"/>
      <table:table table:name="表格37" table:style-name="表格37">
        <table:table-column table:style-name="表格37.A" table:number-columns-repeated="3"/>
        <table:table-header-rows>
          <table:table-row table:style-name="表格37.1">
            <table:table-cell table:style-name="表格37.A1" office:value-type="string">
              <text:p text:style-name="P25" loext:marker-style-name="T5"><text:span text:style-name="T6">實作</text:span><text:span text:style-name="T5"/></text:p>
            </table:table-cell>
            <table:table-cell table:style-name="表格37.A1" office:value-type="string">
              <text:p text:style-name="P25" loext:marker-style-name="T5"><text:span text:style-name="T6">Insert</text:span><text:span text:style-name="T5"/></text:p>
            </table:table-cell>
            <table:table-cell table:style-name="表格37.A1" office:value-type="string">
              <text:p text:style-name="P25" loext:marker-style-name="T5"><text:span text:style-name="T6">Extract-Max</text:span><text:span text:style-name="T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5" loext:marker-style-name="T33"><text:span text:style-name="T36">排序陣列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1) <text:s/>取快插慢</text:span><text:span text:style-name="T33"/></text:p>
          </table:table-cell>
        </table:table-row>
        <table:table-row table:style-name="表格37.1">
          <table:table-cell table:style-name="表格37.A2" office:value-type="string">
            <text:p text:style-name="P25" loext:marker-style-name="T33"><text:span text:style-name="T36">未排序陣列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1)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n) <text:s/>插快取慢</text:span><text:span text:style-name="T33"/></text:p>
          </table:table-cell>
        </table:table-row>
        <table:table-row table:style-name="表格37.1">
          <table:table-cell table:style-name="表格37.A4" office:value-type="string">
            <text:p text:style-name="P25" loext:marker-style-name="T33"><text:span text:style-name="T36">Max Heap ★</text:span><text:span text:style-name="T33"/></text:p>
          </table:table-cell>
          <table:table-cell table:style-name="表格37.A4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7.A4" office:value-type="string">
            <text:p text:style-name="P25" loext:marker-style-name="T33"><text:span text:style-name="T36">O(log n) <text:s/>最均衡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8 句考試必背口訣</text:span><text:span text:style-name="T14"/></text:h>
      <text:p text:style-name="P1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33"><text:span text:style-name="T36">1. <text:s/>Heap = Complete BT + Heap Property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2. <text:s/>parent = A[⌊i/2⌋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3. <text:s/>left child = A[2i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4. <text:s/>right child = A[2i+1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5. <text:s/>Insert → Bubble Up → O(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6. <text:s/>Delete/Extract → Heapify（Bubble Down）→ O(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7. <text:s/>Build Heap（Bottom-Up）= O(n) <text:s/>★ 非 O(n 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8. <text:s/>Heap Sort = O(n log n)，In-place，Unstable</text:span><text:span text:style-name="T3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04T16:04:25.735000000</dc:date>
    <meta:editing-cycles>119</meta:editing-cycles>
    <meta:editing-duration>PT10H20M4S</meta:editing-duration>
    <meta:generator>MODA_ODF_Application_Tools/3.8.4.2$Windows_X86_64 LibreOffice_project/4fb77107d5af14329e08085efe4fa19b5633383a</meta:generator>
    <meta:document-statistic meta:table-count="47" meta:image-count="0" meta:object-count="0" meta:page-count="23" meta:paragraph-count="666" meta:word-count="5937" meta:character-count="15581" meta:non-whitespace-character-count="10388"/>
    <meta:user-defined meta:name="AppVersion">15.0000</meta:user-defined>
  </office:meta>
</office:document-meta>
</file>