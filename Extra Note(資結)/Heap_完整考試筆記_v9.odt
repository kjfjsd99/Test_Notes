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5.A35" style:family="table-cell">
      <style:table-cell-properties fo:background-color="#ff4081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M1" style:family="table">
      <style:table-properties style:width="15.921cm" fo:margin-left="0.071cm" fo:margin-top="0cm" fo:margin-bottom="0cm" table:align="left" style:writing-mode="page"/>
    </style:style>
    <style:style style:name="表格M1.A" style:family="table-column">
      <style:table-column-properties style:column-width="15.921cm"/>
    </style:style>
    <style:style style:name="表格M1.1" style:family="table-row">
      <style:table-row-properties fo:keep-together="auto"/>
    </style:style>
    <style:style style:name="表格M1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M2" style:family="table">
      <style:table-properties style:width="15.921cm" fo:margin-left="0.071cm" fo:margin-top="0cm" fo:margin-bottom="0cm" table:align="left" style:writing-mode="page"/>
    </style:style>
    <style:style style:name="表格M2.A" style:family="table-column">
      <style:table-column-properties style:column-width="15.921cm"/>
    </style:style>
    <style:style style:name="表格M2.1" style:family="table-row">
      <style:table-row-properties fo:keep-together="auto"/>
    </style:style>
    <style:style style:name="表格M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M3" style:family="table">
      <style:table-properties style:width="15.921cm" fo:margin-left="0.071cm" fo:margin-top="0cm" fo:margin-bottom="0cm" table:align="left" style:writing-mode="page"/>
    </style:style>
    <style:style style:name="表格M3.A" style:family="table-column">
      <style:table-column-properties style:column-width="15.921cm"/>
    </style:style>
    <style:style style:name="表格M3.1" style:family="table-row">
      <style:table-row-properties fo:keep-together="auto"/>
    </style:style>
    <style:style style:name="表格M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M4" style:family="table">
      <style:table-properties style:width="15.921cm" fo:margin-left="0.071cm" fo:margin-top="0cm" fo:margin-bottom="0cm" table:align="left" style:writing-mode="page"/>
    </style:style>
    <style:style style:name="表格M4.A" style:family="table-column">
      <style:table-column-properties style:column-width="15.921cm"/>
    </style:style>
    <style:style style:name="表格M4.1" style:family="table-row">
      <style:table-row-properties fo:keep-together="auto"/>
    </style:style>
    <style:style style:name="表格M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M5" style:family="table">
      <style:table-properties style:width="15.921cm" fo:margin-left="0.071cm" fo:margin-top="0cm" fo:margin-bottom="0cm" table:align="left" style:writing-mode="page"/>
    </style:style>
    <style:style style:name="表格M5.A" style:family="table-column">
      <style:table-column-properties style:column-width="15.921cm"/>
    </style:style>
    <style:style style:name="表格M5.1" style:family="table-row">
      <style:table-row-properties fo:keep-together="auto"/>
    </style:style>
    <style:style style:name="表格M5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M6" style:family="table">
      <style:table-properties style:width="15.921cm" fo:margin-left="0.071cm" fo:margin-top="0cm" fo:margin-bottom="0cm" table:align="left" style:writing-mode="page"/>
    </style:style>
    <style:style style:name="表格M6.A" style:family="table-column">
      <style:table-column-properties style:column-width="15.921cm"/>
    </style:style>
    <style:style style:name="表格M6.1" style:family="table-row">
      <style:table-row-properties fo:keep-together="auto"/>
    </style:style>
    <style:style style:name="表格M6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M7" style:family="table">
      <style:table-properties style:width="15.921cm" fo:margin-left="0.071cm" fo:margin-top="0cm" fo:margin-bottom="0cm" table:align="left" style:writing-mode="page"/>
    </style:style>
    <style:style style:name="表格M7.A" style:family="table-column">
      <style:table-column-properties style:column-width="15.921cm"/>
    </style:style>
    <style:style style:name="表格M7.1" style:family="table-row">
      <style:table-row-properties fo:keep-together="auto"/>
    </style:style>
    <style:style style:name="表格M7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M8" style:family="table">
      <style:table-properties style:width="15.921cm" fo:margin-left="0.071cm" fo:margin-top="0cm" fo:margin-bottom="0cm" table:align="left" style:writing-mode="page"/>
    </style:style>
    <style:style style:name="表格M8.A" style:family="table-column">
      <style:table-column-properties style:column-width="15.921cm"/>
    </style:style>
    <style:style style:name="表格M8.1" style:family="table-row">
      <style:table-row-properties fo:keep-together="auto"/>
    </style:style>
    <style:style style:name="表格M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M9" style:family="table">
      <style:table-properties style:width="15.921cm" fo:margin-left="0.071cm" fo:margin-top="0cm" fo:margin-bottom="0cm" table:align="left" style:writing-mode="page"/>
    </style:style>
    <style:style style:name="表格M9.A" style:family="table-column">
      <style:table-column-properties style:column-width="15.921cm"/>
    </style:style>
    <style:style style:name="表格M9.1" style:family="table-row">
      <style:table-row-properties fo:keep-together="auto"/>
    </style:style>
    <style:style style:name="表格M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M10" style:family="table">
      <style:table-properties style:width="15.921cm" fo:margin-left="0.071cm" fo:margin-top="0cm" fo:margin-bottom="0cm" table:align="left" style:writing-mode="page"/>
    </style:style>
    <style:style style:name="表格M10.A" style:family="table-column">
      <style:table-column-properties style:column-width="15.921cm"/>
    </style:style>
    <style:style style:name="表格M10.1" style:family="table-row">
      <style:table-row-properties fo:keep-together="auto"/>
    </style:style>
    <style:style style:name="表格M10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M11" style:family="table">
      <style:table-properties style:width="15.921cm" fo:margin-left="0.071cm" fo:margin-top="0cm" fo:margin-bottom="0cm" table:align="left" style:writing-mode="page"/>
    </style:style>
    <style:style style:name="表格M11.A" style:family="table-column">
      <style:table-column-properties style:column-width="15.921cm"/>
    </style:style>
    <style:style style:name="表格M11.1" style:family="table-row">
      <style:table-row-properties fo:keep-together="auto"/>
    </style:style>
    <style:style style:name="表格M11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3" style:family="paragraph" style:parent-style-name="Standard">
      <style:paragraph-properties fo:margin-top="0.053cm" fo:margin-bottom="0.053cm" style:contextual-spacing="false"/>
    </style:style>
    <style:style style:name="P4" style:family="paragraph" style:parent-style-name="Standard">
      <style:paragraph-properties fo:margin-top="0.053cm" fo:margin-bottom="0.053cm" style:contextual-spacing="false"/>
      <style:text-properties fo:color="#ffea00" loext:opacity="100%" fo:font-weight="bold" fo:background-color="#bf360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ea00" loext:opacity="100%" fo:background-color="#311b92"/>
    </style:style>
    <style:style style:name="P6" style:family="paragraph" style:parent-style-name="Standard">
      <style:paragraph-properties fo:margin-top="0cm" fo:margin-bottom="0.212cm" style:contextual-spacing="false"/>
    </style:style>
    <style:style style:name="P7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8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9" style:family="paragraph" style:parent-style-name="Standard">
      <style:paragraph-properties fo:margin-top="0cm" fo:margin-bottom="0.141cm" style:contextual-spacing="false"/>
    </style:style>
    <style:style style:name="P10" style:family="paragraph" style:parent-style-name="Standard">
      <style:paragraph-properties fo:margin-top="0cm" fo:margin-bottom="0.282cm" style:contextual-spacing="false"/>
    </style:style>
    <style:style style:name="P11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/>
      <style:text-properties fo:color="#ffab40" loext:opacity="100%" fo:font-weight="bold" fo:background-color="#311b92" style:font-weight-asian="bold" style:font-weight-complex="bold"/>
    </style:style>
    <style:style style:name="P13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14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15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6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17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18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19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20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22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23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24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25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26" style:family="paragraph" style:parent-style-name="List_20_Paragraph" style:list-style-name="WWNum14">
      <style:paragraph-properties fo:margin-top="0cm" fo:margin-bottom="0.141cm" style:contextual-spacing="false"/>
    </style:style>
    <style:style style:name="P27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8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margin-top="0.106cm" fo:margin-bottom="0.106cm" style:contextual-spacing="false"/>
    </style:style>
    <style:style style:name="P31" style:family="paragraph" style:parent-style-name="Standard">
      <style:paragraph-properties fo:margin-top="0.053cm" fo:margin-bottom="0.053cm" style:contextual-spacing="false"/>
    </style:style>
    <style:style style:name="P32" style:family="paragraph" style:parent-style-name="Standard">
      <style:paragraph-properties fo:margin-top="0.318cm" fo:margin-bottom="0.106cm" style:contextual-spacing="false"/>
    </style:style>
    <style:style style:name="P33" style:family="paragraph" style:parent-style-name="Standard">
      <style:paragraph-properties fo:margin-top="0.053cm" fo:margin-bottom="0.053cm" style:contextual-spacing="false"/>
      <style:text-properties officeooo:paragraph-rsid="00542c65"/>
    </style:style>
    <style:style style:name="P34" style:family="paragraph" style:parent-style-name="Standard">
      <style:paragraph-properties fo:margin-top="0.053cm" fo:margin-bottom="0.053cm" style:contextual-spacing="false"/>
      <style:text-properties officeooo:paragraph-rsid="00554de0"/>
    </style:style>
    <style:style style:name="P35" style:family="paragraph" style:parent-style-name="Standard">
      <style:paragraph-properties fo:margin-top="0.053cm" fo:margin-bottom="0.053cm" style:contextual-spacing="false"/>
      <style:text-properties officeooo:paragraph-rsid="005ccf35"/>
    </style:style>
    <style:style style:name="P36" style:family="paragraph" style:parent-style-name="Standard">
      <style:paragraph-properties fo:margin-top="0.106cm" fo:margin-bottom="0.106cm" style:contextual-spacing="false"/>
      <style:text-properties officeooo:paragraph-rsid="00661972"/>
    </style:style>
    <style:style style:name="P37" style:family="paragraph" style:parent-style-name="Standard" style:list-style-name="WWNum2">
      <style:paragraph-properties fo:margin-top="0.071cm" fo:margin-bottom="0.071cm" style:contextual-spacing="false"/>
    </style:style>
    <style:style style:name="P38" style:family="paragraph" style:parent-style-name="Standard">
      <style:paragraph-properties fo:margin-top="0cm" fo:margin-bottom="0.212cm" style:contextual-spacing="false"/>
    </style:style>
    <style:style style:name="P39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40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41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42" style:family="paragraph" style:parent-style-name="Standard">
      <style:paragraph-properties fo:margin-top="0cm" fo:margin-bottom="0.141cm" style:contextual-spacing="false"/>
    </style:style>
    <style:style style:name="P43" style:family="paragraph" style:parent-style-name="Standard">
      <style:paragraph-properties fo:margin-top="0cm" fo:margin-bottom="0cm" style:contextual-spacing="false"/>
    </style:style>
    <style:style style:name="P44" style:family="paragraph" style:parent-style-name="Standard">
      <style:text-properties fo:color="#ffff00" loext:opacity="100%" style:font-name="Arial1" fo:font-size="11pt" fo:font-weight="bold" fo:background-color="#ff9100" style:font-name-asian="Arial2" style:font-size-asian="11pt" style:font-weight-asian="bold" style:font-name-complex="Arial2" style:font-size-complex="11pt" style:font-weight-complex="bold"/>
    </style:style>
    <style:style style:name="P45" style:family="paragraph" style:parent-style-name="Standard">
      <style:paragraph-properties fo:margin-top="0cm" fo:margin-bottom="0cm" style:contextual-spacing="false"/>
      <style:text-properties fo:color="#ffff00" loext:opacity="100%" fo:font-weight="bold" fo:background-color="#ff9100" style:font-weight-asian="bold" style:font-weight-complex="bold"/>
    </style:style>
    <style:style style:name="P46" style:family="paragraph" style:parent-style-name="Standard">
      <style:paragraph-properties fo:margin-top="0cm" fo:margin-bottom="0.282cm" style:contextual-spacing="false"/>
      <style:text-properties fo:color="#ffff00" loext:opacity="100%" fo:font-weight="bold" fo:background-color="#ff9100" style:font-weight-asian="bold" style:font-weight-complex="bold"/>
    </style:style>
    <style:style style:name="P47" style:family="paragraph" style:parent-style-name="Standard">
      <style:text-properties fo:color="#f8bbd0" loext:opacity="100%" style:font-name="Arial1" fo:font-size="11pt" fo:font-weight="bold" fo:background-color="#880e4f" style:font-name-asian="Arial2" style:font-size-asian="11pt" style:font-weight-asian="bold" style:font-name-complex="Arial2" style:font-size-complex="11pt" style:font-weight-complex="bold"/>
    </style:style>
    <style:style style:name="P48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7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9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1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12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4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6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17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8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20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21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22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23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24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25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26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7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28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9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30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31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32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33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34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35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36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37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8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9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40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41" style:family="text">
      <style:text-properties fo:color="#595959" loext:opacity="100%" style:font-name="Arial1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42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43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44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5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6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47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48" style:family="text">
      <style:text-properties fo:color="#595959" loext:opacity="100%" fo:font-size="11pt" style:font-size-asian="11pt" style:font-name-complex="Arial2" style:font-size-complex="11pt"/>
    </style:style>
    <style:style style:name="T49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50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51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52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3" style:family="text">
      <style:text-properties fo:color="#595959" loext:opacity="100%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54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5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56" style:family="text">
      <style:text-properties fo:color="#595959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57" style:family="text">
      <style:text-properties fo:color="#595959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58" style:family="text">
      <style:text-properties fo:color="#595959" loext:opacity="100%" fo:font-size="10.5pt" fo:font-weight="bold" fo:background-color="#ffc400" loext:char-shading-value="0" style:font-name-asian="Arial2" style:font-size-asian="10.5pt" style:font-weight-asian="bold" style:font-name-complex="Arial2" style:font-size-complex="10.5pt" style:font-weight-complex="bold"/>
    </style:style>
    <style:style style:name="T59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60" style:family="text">
      <style:text-properties fo:color="#595959" loext:opacity="100%" fo:font-size="10.5pt" style:font-size-asian="10.5pt" style:font-name-complex="Arial2" style:font-size-complex="10.5pt"/>
    </style:style>
    <style:style style:name="T61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62" style:family="text">
      <style:text-properties fo:color="#595959" loext:opacity="100%" fo:font-size="10.5pt" fo:background-color="#ffff00" loext:char-shading-value="0" style:font-size-asian="10.5pt" style:font-name-complex="Arial2" style:font-size-complex="10.5pt"/>
    </style:style>
    <style:style style:name="T63" style:family="text">
      <style:text-properties fo:color="#595959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64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65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6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67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68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69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70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71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72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3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4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5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76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77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78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79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80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81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82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83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84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85" style:family="text">
      <style:text-properties fo:color="#18ffff" loext:opacity="100%" style:font-name="Arial1" fo:font-size="12pt" fo:font-weight="bold" fo:background-color="#1a237e" loext:char-shading-value="0" style:font-size-asian="12pt" style:font-weight-asian="bold" style:font-name-complex="Arial2" style:font-size-complex="12pt" style:font-weight-complex="bold"/>
    </style:style>
    <style:style style:name="T86" style:family="text">
      <style:text-properties fo:color="#18ffff" loext:opacity="100%" style:font-name="Arial1" fo:font-size="12pt" fo:font-weight="bold" fo:background-color="#01579b" loext:char-shading-value="0" style:font-size-asian="12pt" style:font-weight-asian="bold" style:font-name-complex="Arial2" style:font-size-complex="12pt" style:font-weight-complex="bold"/>
    </style:style>
    <style:style style:name="T87" style:family="text">
      <style:text-properties fo:color="#18ffff" loext:opacity="100%" style:font-name="Arial1" fo:font-size="12pt" fo:background-color="#d500f9" loext:char-shading-value="0" style:font-size-asian="12pt" style:font-name-complex="Arial2" style:font-size-complex="12pt"/>
    </style:style>
    <style:style style:name="T88" style:family="text">
      <style:text-properties fo:color="#18ffff" loext:opacity="100%" style:font-name="Arial1" fo:font-size="12pt" fo:background-color="#1a237e" loext:char-shading-value="0" style:font-size-asian="12pt" style:font-name-complex="Arial2" style:font-size-complex="12pt"/>
    </style:style>
    <style:style style:name="T89" style:family="text">
      <style:text-properties fo:color="#18ffff" loext:opacity="100%" style:font-name="Arial1" fo:font-size="12pt" fo:background-color="#01579b" loext:char-shading-value="0" style:font-size-asian="12pt" style:font-name-complex="Arial2" style:font-size-complex="12pt"/>
    </style:style>
    <style:style style:name="T90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91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92" style:family="text">
      <style:text-properties fo:color="#18ffff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93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4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5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96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7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98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99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0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01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102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03" style:family="text">
      <style:text-properties fo:color="#76ff03" loext:opacity="100%" fo:font-size="10.5pt" fo:font-weight="bold" fo:background-color="#1b5e20" loext:char-shading-value="0" style:font-name-asian="Arial2" style:font-size-asian="10.5pt" style:font-weight-asian="bold" style:font-name-complex="Arial2" style:font-size-complex="10.5pt" style:font-weight-complex="bold"/>
    </style:style>
    <style:style style:name="T104" style:family="text">
      <style:text-properties fo:color="#76ff03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105" style:family="text">
      <style:text-properties fo:color="#76ff03" loext:opacity="100%" style:font-name="Arial1" fo:font-size="10.5pt" fo:font-weight="bold" fo:background-color="#1b5e20" loext:char-shading-value="0" style:font-size-asian="10.5pt" style:font-weight-asian="bold" style:font-name-complex="Arial2" style:font-size-complex="10.5pt" style:font-weight-complex="bold"/>
    </style:style>
    <style:style style:name="T106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7" style:family="text">
      <style:text-properties fo:color="#76ff03" loext:opacity="100%" style:font-name="Arial1" fo:font-size="11pt" fo:font-weight="bold" fo:background-color="#1b5e20" loext:char-shading-value="0" style:font-size-asian="11pt" style:font-weight-asian="bold" style:font-name-complex="Arial2" style:font-size-complex="11pt" style:font-weight-complex="bold"/>
    </style:style>
    <style:style style:name="T108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09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10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1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12" style:family="text">
      <style:text-properties fo:color="#76ff03" loext:opacity="100%" style:font-name="Courier New" fo:font-size="9.5pt" fo:font-weight="bold" fo:background-color="#33691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13" style:family="text">
      <style:text-properties fo:color="#76ff03" loext:opacity="100%" style:font-name="Courier New" fo:font-size="9.5pt" fo:font-weight="bold" fo:background-color="#006064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14" style:family="text">
      <style:text-properties fo:color="#76ff03" loext:opacity="100%" style:font-name="Courier New" fo:font-size="9.5pt" fo:background-color="#33691e" loext:char-shading-value="0" style:font-name-asian="Courier New1" style:font-size-asian="9.5pt" style:font-name-complex="Courier New1" style:font-size-complex="9.5pt"/>
    </style:style>
    <style:style style:name="T115" style:family="text">
      <style:text-properties fo:color="#76ff03" loext:opacity="100%" style:font-name="Courier New" fo:font-size="9.5pt" fo:background-color="#006064" loext:char-shading-value="0" style:font-name-asian="Courier New1" style:font-size-asian="9.5pt" style:font-name-complex="Courier New1" style:font-size-complex="9.5pt"/>
    </style:style>
    <style:style style:name="T116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17" style:family="text">
      <style:text-properties fo:color="#ff1744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18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19" style:family="text">
      <style:text-properties fo:color="#ff1744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20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21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22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23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24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25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126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27" style:family="text">
      <style:text-properties fo:color="#64ffda" loext:opacity="100%" style:font-name="Arial1" fo:font-size="12pt" fo:font-weight="bold" fo:background-color="#1a237e" loext:char-shading-value="0" style:font-size-asian="12pt" style:font-weight-asian="bold" style:font-name-complex="Arial2" style:font-size-complex="12pt" style:font-weight-complex="bold"/>
    </style:style>
    <style:style style:name="T128" style:family="text">
      <style:text-properties fo:color="#64ffd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129" style:family="text">
      <style:text-properties fo:color="#64ffda" loext:opacity="100%" style:font-name="Arial1" fo:font-size="12pt" fo:font-weight="bold" fo:background-color="#311b92" loext:char-shading-value="0" style:font-size-asian="12pt" style:font-weight-asian="bold" style:font-name-complex="Arial2" style:font-size-complex="12pt" style:font-weight-complex="bold"/>
    </style:style>
    <style:style style:name="T130" style:family="text">
      <style:text-properties fo:color="#64ffda" loext:opacity="100%" style:font-name="Arial1" fo:font-size="12pt" fo:font-weight="bold" fo:background-color="#311b92" loext:char-shading-value="0" style:font-size-asian="12pt" style:font-weight-asian="bold" style:font-name-complex="Arial2" style:font-size-complex="12pt" style:font-weight-complex="bold"/>
    </style:style>
    <style:style style:name="T131" style:family="text">
      <style:text-properties fo:color="#64ffda" loext:opacity="100%" style:font-name="Arial1" fo:font-size="12pt" fo:font-weight="bold" fo:background-color="#4a148c" loext:char-shading-value="0" style:font-size-asian="12pt" style:font-weight-asian="bold" style:font-name-complex="Arial2" style:font-size-complex="12pt" style:font-weight-complex="bold"/>
    </style:style>
    <style:style style:name="T132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33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34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35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36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37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38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39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40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41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42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43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144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145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46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47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8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49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50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51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52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53" style:family="text">
      <style:text-properties fo:color="#ff4081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154" style:family="text">
      <style:text-properties fo:color="#ff4081" loext:opacity="100%" fo:font-size="10.5pt" fo:font-weight="bold" fo:background-color="#0d47a1" loext:char-shading-value="0" style:font-size-asian="10.5pt" style:font-weight-asian="bold" style:font-name-complex="Arial2" style:font-size-complex="10.5pt" style:font-weight-complex="bold"/>
    </style:style>
    <style:style style:name="T155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56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7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158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159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60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61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62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63" style:family="text">
      <style:text-properties fo:color="#c6ff00" loext:opacity="100%" style:font-name="Arial1" fo:font-size="12pt" fo:font-weight="bold" fo:background-color="#4a148c" loext:char-shading-value="0" style:font-size-asian="12pt" style:font-weight-asian="bold" style:font-name-complex="Arial2" style:font-size-complex="12pt" style:font-weight-complex="bold"/>
    </style:style>
    <style:style style:name="T164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165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66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7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68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69" style:family="text">
      <style:text-properties fo:color="#ffea00" loext:opacity="100%" fo:font-size="10.5pt" fo:font-weight="bold" fo:background-color="#e65100" loext:char-shading-value="0" style:font-name-asian="Arial2" style:font-size-asian="10.5pt" style:font-weight-asian="bold" style:font-name-complex="Arial2" style:font-size-complex="10.5pt" style:font-weight-complex="bold"/>
    </style:style>
    <style:style style:name="T170" style:family="text">
      <style:text-properties fo:color="#ffea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71" style:family="text">
      <style:text-properties fo:color="#ffea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72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173" style:family="text">
      <style:text-properties fo:color="#ffea00" loext:opacity="100%" fo:font-weight="bold" fo:background-color="#b71c1c" loext:char-shading-value="0" style:font-weight-asian="bold" style:font-weight-complex="bold"/>
    </style:style>
    <style:style style:name="T174" style:family="text">
      <style:text-properties fo:color="#ffea00" loext:opacity="100%" fo:font-weight="bold" fo:background-color="#1a237e" loext:char-shading-value="0" style:font-weight-asian="bold" style:font-weight-complex="bold"/>
    </style:style>
    <style:style style:name="T175" style:family="text">
      <style:text-properties fo:color="#ffea00" loext:opacity="100%" style:font-name="Arial1" fo:font-size="12pt" fo:font-weight="bold" fo:background-color="#1a237e" loext:char-shading-value="0" style:font-name-asian="Arial2" style:font-size-asian="12pt" style:font-weight-asian="bold" style:font-name-complex="Arial2" style:font-size-complex="12pt" style:font-weight-complex="bold"/>
    </style:style>
    <style:style style:name="T176" style:family="text">
      <style:text-properties fo:color="#ffea00" loext:opacity="100%" style:font-name="Arial1" fo:font-size="12pt" fo:font-weight="bold" fo:background-color="#1a237e" loext:char-shading-value="0" style:font-size-asian="12pt" style:font-weight-asian="bold" style:font-name-complex="Arial2" style:font-size-complex="12pt" style:font-weight-complex="bold"/>
    </style:style>
    <style:style style:name="T177" style:family="text">
      <style:text-properties fo:color="#ffea0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78" style:family="text">
      <style:text-properties fo:color="#ffea0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79" style:family="text">
      <style:text-properties fo:color="#ffea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80" style:family="text">
      <style:text-properties fo:color="#ffea00" loext:opacity="100%" style:font-name="Courier New" fo:font-size="9.5pt" fo:background-color="#b71c1c" loext:char-shading-value="0" style:font-name-asian="Courier New1" style:font-size-asian="9.5pt" style:font-name-complex="Courier New1" style:font-size-complex="9.5pt"/>
    </style:style>
    <style:style style:name="T181" style:family="text">
      <style:text-properties fo:color="#ffea00" loext:opacity="100%" style:font-name="Courier New" fo:font-size="9.5pt" fo:font-weight="bold" fo:background-color="#b71c1c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2" style:family="text">
      <style:text-properties fo:color="#e1bee7" loext:opacity="100%" style:font-name="Arial1" fo:font-size="10.5pt" fo:font-weight="bold" fo:background-color="#4a148c" loext:char-shading-value="0" style:font-size-asian="10.5pt" style:font-weight-asian="bold" style:font-name-complex="Arial2" style:font-size-complex="10.5pt" style:font-weight-complex="bold"/>
    </style:style>
    <style:style style:name="T183" style:family="text">
      <style:text-properties fo:color="#e1bee7" loext:opacity="100%" fo:font-size="10.5pt" fo:font-weight="bold" fo:background-color="#4a148c" loext:char-shading-value="0" style:font-name-asian="Arial2" style:font-size-asian="10.5pt" style:font-weight-asian="bold" style:font-name-complex="Arial2" style:font-size-complex="10.5pt" style:font-weight-complex="bold"/>
    </style:style>
    <style:style style:name="T184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85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86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87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88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89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90" style:family="text">
      <style:text-properties fo:color="#ff3d00" loext:opacity="100%" style:font-name="Arial1" fo:font-size="12pt" fo:background-color="#64ffda" loext:char-shading-value="0" style:font-size-asian="12pt" style:font-name-complex="Arial2" style:font-size-complex="12pt"/>
    </style:style>
    <style:style style:name="T191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92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93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94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95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6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7" style:family="text">
      <style:text-properties fo:color="#d1c4e9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198" style:family="text">
      <style:text-properties fo:color="#d1c4e9" loext:opacity="100%" style:font-name="Arial1" fo:font-size="10.5pt" fo:font-weight="bold" fo:background-color="#311b92" loext:char-shading-value="0" style:font-size-asian="10.5pt" style:font-weight-asian="bold" style:font-name-complex="Arial2" style:font-size-complex="10.5pt" style:font-weight-complex="bold"/>
    </style:style>
    <style:style style:name="T199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200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201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202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203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204" style:family="text">
      <style:text-properties fo:color="#ffff00" loext:opacity="100%" style:font-name="Arial1" fo:font-size="12pt" fo:font-weight="bold" fo:background-color="#ff9100" loext:char-shading-value="0" style:font-name-asian="Arial2" style:font-size-asian="12pt" style:font-weight-asian="bold" style:font-name-complex="Arial2" style:font-size-complex="12pt" style:font-weight-complex="bold"/>
    </style:style>
    <style:style style:name="T205" style:family="text">
      <style:text-properties fo:color="#ffff00" loext:opacity="100%" style:font-name="Arial1" fo:font-size="12pt" fo:background-color="#ff9100" loext:char-shading-value="0" style:font-size-asian="12pt" style:font-name-complex="Arial2" style:font-size-complex="12pt"/>
    </style:style>
    <style:style style:name="T206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207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208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209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210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211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212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13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214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15" style:family="text">
      <style:text-properties fo:font-weight="bold" fo:background-color="#ffd740" loext:char-shading-value="0" style:font-weight-asian="bold" style:font-weight-complex="bold"/>
    </style:style>
    <style:style style:name="T216" style:family="text">
      <style:text-properties fo:font-weight="bold" fo:background-color="#18ffff" loext:char-shading-value="0" style:font-weight-asian="bold" style:font-weight-complex="bold"/>
    </style:style>
    <style:style style:name="T217" style:family="text">
      <style:text-properties fo:font-weight="bold" fo:background-color="#ffff00" loext:char-shading-value="0" style:font-weight-asian="bold" style:font-weight-complex="bold"/>
    </style:style>
    <style:style style:name="T218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19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20" style:family="text">
      <style:text-properties fo:font-size="10.5pt" fo:font-weight="bold" style:font-size-asian="10.5pt" style:font-weight-asian="bold" style:font-name-complex="Arial2" style:font-size-complex="10.5pt" style:font-weight-complex="bold"/>
    </style:style>
    <style:style style:name="T221" style:family="text">
      <style:text-properties fo:font-size="10.5pt" style:font-name-asian="Arial2" style:font-size-asian="10.5pt" style:font-name-complex="Arial2" style:font-size-complex="10.5pt"/>
    </style:style>
    <style:style style:name="T222" style:family="text">
      <style:text-properties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23" style:family="text">
      <style:text-properties style:font-name="Arial1" fo:font-size="12pt" style:font-size-asian="12pt" style:font-name-complex="Arial2" style:font-size-complex="12pt"/>
    </style:style>
    <style:style style:name="T224" style:family="text">
      <style:text-properties style:font-name="Arial1" fo:font-size="12pt" style:font-name-asian="Arial2" style:font-size-asian="12pt" style:font-name-complex="Arial2" style:font-size-complex="12pt"/>
    </style:style>
    <style:style style:name="T225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226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27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228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229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230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31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232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233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234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235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236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237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238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239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40" style:family="text">
      <style:text-properties fo:color="#1a1a1a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241" style:family="text">
      <style:text-properties fo:color="#1a1a1a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242" style:family="text">
      <style:text-properties fo:color="#1a1a1a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243" style:family="text">
      <style:text-properties fo:color="#1a1a1a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244" style:family="text">
      <style:text-properties fo:color="#1a1a1a" loext:opacity="100%" style:font-name="Arial1" fo:font-size="12pt" fo:font-weight="bold" fo:background-color="#1a237e" loext:char-shading-value="0" style:font-size-asian="12pt" style:font-weight-asian="bold" style:font-name-complex="Arial2" style:font-size-complex="12pt" style:font-weight-complex="bold"/>
    </style:style>
    <style:style style:name="T245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246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247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248" style:family="text">
      <style:text-properties fo:color="#1a1a1a" loext:opacity="100%" style:font-name="Arial1" fo:font-size="12pt" fo:background-color="#1a237e" loext:char-shading-value="0" style:font-size-asian="12pt" style:font-name-complex="Arial2" style:font-size-complex="12pt"/>
    </style:style>
    <style:style style:name="T249" style:family="text">
      <style:text-properties fo:color="#1a1a1a" loext:opacity="100%" style:font-name="Arial1" fo:font-size="12pt" fo:background-color="#1a237e" loext:char-shading-value="0" style:font-size-asian="12pt" style:font-name-complex="Arial2" style:font-size-complex="12pt"/>
    </style:style>
    <style:style style:name="T250" style:family="text">
      <style:text-properties fo:color="#1a1a1a" loext:opacity="100%" style:font-name="Arial1" fo:font-size="12pt" fo:background-color="#ffd740" loext:char-shading-value="0" style:font-size-asian="12pt" style:font-name-complex="Arial2" style:font-size-complex="12pt"/>
    </style:style>
    <style:style style:name="T251" style:family="text">
      <style:text-properties fo:color="#1a1a1a" loext:opacity="100%" style:font-name="Arial1" fo:font-size="12pt" fo:background-color="#ffd740" loext:char-shading-value="0" style:font-size-asian="12pt" style:font-name-complex="Arial2" style:font-size-complex="12pt"/>
    </style:style>
    <style:style style:name="T252" style:family="text">
      <style:text-properties fo:color="#1a1a1a" loext:opacity="100%" style:font-name="Arial1" fo:font-size="12pt" fo:background-color="#d500f9" loext:char-shading-value="0" style:font-size-asian="12pt" style:font-name-complex="Arial2" style:font-size-complex="12pt"/>
    </style:style>
    <style:style style:name="T253" style:family="text">
      <style:text-properties fo:color="#1a1a1a" loext:opacity="100%" style:font-name="Arial1" fo:font-size="12pt" fo:background-color="#d500f9" loext:char-shading-value="0" style:font-size-asian="12pt" style:font-name-complex="Arial2" style:font-size-complex="12pt"/>
    </style:style>
    <style:style style:name="T254" style:family="text">
      <style:text-properties fo:color="#1a1a1a" loext:opacity="100%" style:font-name="Arial1" fo:font-size="12pt" fo:background-color="#ff9100" loext:char-shading-value="0" style:font-size-asian="12pt" style:font-name-complex="Arial2" style:font-size-complex="12pt"/>
    </style:style>
    <style:style style:name="T255" style:family="text">
      <style:text-properties fo:color="#1a1a1a" loext:opacity="100%" style:font-name="Arial1" fo:font-size="12pt" fo:background-color="#ff9100" loext:char-shading-value="0" style:font-size-asian="12pt" style:font-name-complex="Arial2" style:font-size-complex="12pt"/>
    </style:style>
    <style:style style:name="T256" style:family="text">
      <style:text-properties fo:color="#1a1a1a" loext:opacity="100%" style:font-name="Arial1" fo:font-size="12pt" fo:background-color="#64ffda" loext:char-shading-value="0" style:font-size-asian="12pt" style:font-name-complex="Arial2" style:font-size-complex="12pt"/>
    </style:style>
    <style:style style:name="T257" style:family="text">
      <style:text-properties fo:color="#1a1a1a" loext:opacity="100%" style:font-name="Arial1" fo:font-size="12pt" fo:background-color="#64ffda" loext:char-shading-value="0" style:font-size-asian="12pt" style:font-name-complex="Arial2" style:font-size-complex="12pt"/>
    </style:style>
    <style:style style:name="T258" style:family="text">
      <style:text-properties fo:color="#1a1a1a" loext:opacity="100%" style:font-name="Arial1" fo:font-size="12pt" fo:background-color="#01579b" loext:char-shading-value="0" style:font-size-asian="12pt" style:font-name-complex="Arial2" style:font-size-complex="12pt"/>
    </style:style>
    <style:style style:name="T259" style:family="text">
      <style:text-properties fo:color="#1a1a1a" loext:opacity="100%" style:font-name="Arial1" fo:font-size="12pt" fo:background-color="#01579b" loext:char-shading-value="0" style:font-size-asian="12pt" style:font-name-complex="Arial2" style:font-size-complex="12pt"/>
    </style:style>
    <style:style style:name="T260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261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262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263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64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65" style:family="text">
      <style:text-properties fo:color="#2b2b2b" loext:opacity="100%" style:font-name="Courier New" fo:font-size="9.5pt" fo:background-color="#b71c1c" loext:char-shading-value="0" style:font-name-asian="Courier New1" style:font-size-asian="9.5pt" style:font-name-complex="Courier New1" style:font-size-complex="9.5pt"/>
    </style:style>
    <style:style style:name="T266" style:family="text">
      <style:text-properties fo:color="#2b2b2b" loext:opacity="100%" style:font-name="Courier New" fo:font-size="9.5pt" fo:background-color="#b71c1c" loext:char-shading-value="0" style:font-name-asian="Courier New1" style:font-size-asian="9.5pt" style:font-name-complex="Courier New1" style:font-size-complex="9.5pt"/>
    </style:style>
    <style:style style:name="T267" style:family="text">
      <style:text-properties fo:color="#2b2b2b" loext:opacity="100%" style:font-name="Courier New" fo:font-size="9.5pt" fo:background-color="#33691e" loext:char-shading-value="0" style:font-name-asian="Courier New1" style:font-size-asian="9.5pt" style:font-name-complex="Courier New1" style:font-size-complex="9.5pt"/>
    </style:style>
    <style:style style:name="T268" style:family="text">
      <style:text-properties fo:color="#2b2b2b" loext:opacity="100%" style:font-name="Courier New" fo:font-size="9.5pt" fo:background-color="#33691e" loext:char-shading-value="0" style:font-name-asian="Courier New1" style:font-size-asian="9.5pt" style:font-name-complex="Courier New1" style:font-size-complex="9.5pt"/>
    </style:style>
    <style:style style:name="T269" style:family="text">
      <style:text-properties fo:color="#2b2b2b" loext:opacity="100%" style:font-name="Courier New" fo:font-size="9.5pt" fo:background-color="#006064" loext:char-shading-value="0" style:font-name-asian="Courier New1" style:font-size-asian="9.5pt" style:font-name-complex="Courier New1" style:font-size-complex="9.5pt"/>
    </style:style>
    <style:style style:name="T270" style:family="text">
      <style:text-properties fo:color="#2b2b2b" loext:opacity="100%" style:font-name="Courier New" fo:font-size="9.5pt" fo:background-color="#006064" loext:char-shading-value="0" style:font-name-asian="Courier New1" style:font-size-asian="9.5pt" style:font-name-complex="Courier New1" style:font-size-complex="9.5pt"/>
    </style:style>
    <style:style style:name="T271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72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73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74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275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76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277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278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279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280" style:family="text">
      <style:text-properties fo:color="#404040" loext:opacity="100%" fo:font-size="11pt" fo:background-color="#ffff00" loext:char-shading-value="0" style:font-name-asian="Arial2" style:font-size-asian="11pt" style:font-name-complex="Arial2" style:font-size-complex="11pt"/>
    </style:style>
    <style:style style:name="T281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82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283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284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85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86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 loext:marker-style-name="T1"><text:span text:style-name="T2">【</text:span><text:span text:style-name="T9">11</text:span><text:span text:style-name="T2">】堆積（</text:span><text:span text:style-name="T9">Heap</text:span><text:span text:style-name="T2">）＋優先佇列（</text:span><text:span text:style-name="T9">Priority Queue</text:span><text:span text:style-name="T2">）</text:span></text:p>
      <text:p text:style-name="P28" loext:marker-style-name="T15"><text:span text:style-name="T16">資訊類公職考試完整筆記 ● 考點：</text:span><text:span text:style-name="T25">110</text:span><text:span text:style-name="T16">地</text:span><text:span text:style-name="T25">Q4</text:span><text:span text:style-name="T16">、</text:span><text:span text:style-name="T25">111</text:span><text:span text:style-name="T16">地</text:span><text:span text:style-name="T25">Q4</text:span><text:span text:style-name="T16">、</text:span><text:span text:style-name="T25">113</text:span><text:span text:style-name="T16">地</text:span><text:span text:style-name="T25">Q3</text:span><text:span text:style-name="T16">、</text:span><text:span text:style-name="T25">114</text:span><text:span text:style-name="T16">地</text:span><text:span text:style-name="T25">Q2</text:span></text:p>
      <text:p text:style-name="P1"/>
      <text:h text:style-name="P13" text:outline-level="1" loext:marker-style-name="T3"><text:span text:style-name="T4">一、</text:span><text:span text:style-name="T10">Heap </text:span><text:span text:style-name="T4">的定義與兩大條件</text:span></text:h>
      <text:p text:style-name="P30" loext:marker-style-name="T28"><text:span text:style-name="T44">Heap</text:span><text:span text:style-name="T29">（堆積）是一種特殊的二元樹，必須同時滿足以下兩個條件，缺一不可：</text:span></text:p>
      <text:p text:style-name="P1"/>
      <text:h text:style-name="P15" text:outline-level="2" loext:marker-style-name="T17"><text:span text:style-name="T18">條件</text:span><text:span text:style-name="T26">1</text:span><text:span text:style-name="T18">：</text:span><text:span text:style-name="T26">Complete Binary Tree</text:span><text:span text:style-name="T18">（完全二元樹）</text:span></text:h>
      <text:list xml:id="list1392989833" text:style-name="WWNum5">
        <text:list-item text:start-value="1">
          <text:p text:style-name="P17" loext:marker-style-name="T34"><text:span text:style-name="T64">每一層節點都必須盡量填滿</text:span><text:span text:style-name="T35">。</text:span></text:p>
        </text:list-item>
        <text:list-item text:style-override="WWNum6">
          <text:p text:style-name="P18" loext:marker-style-name="T34"><text:span text:style-name="T36">最後一層</text:span><text:span text:style-name="T35">的節點必須</text:span><text:span text:style-name="T75">從左往右依序填入</text:span><text:span text:style-name="T35">，</text:span><text:span text:style-name="T78">不可跳過</text:span><text:span text:style-name="T35">。</text:span></text:p>
        </text:list-item>
      </text:list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 loext:marker-style-name="T42"><text:span text:style-name="T49">✅ </text:span><text:span text:style-name="T43">合法 </text:span><text:span text:style-name="T49">Complete Binary Tree</text:span><text:span text:style-name="T43">：</text:span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7"/>100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8"/>/ <text:s text:c="2"/>\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4"/>90 <text:s text:c="4"/>80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4"/>/ \ <text:s text:c="5"/>/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37"><text:span text:style-name="T50">70 <text:s/>60 50</text:span><text:span text:style-name="T37"/></text:p>
          </table:table-cell>
        </table:table-row>
        <table:table-row table:style-name="表格1.1">
          <table:table-cell table:style-name="表格1.A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❌ </text:span><text:span text:style-name="T43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7"/>100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8"/>/ <text:s text:c="2"/>\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4"/>90 <text:s text:c="4"/>80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8"/>\ <text:s text:c="2"/>/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6"/></text:span><text:span text:style-name="T50">60 50</text:span></text:p>
          </table:table-cell>
        </table:table-row>
      </table:table>
      <text:p text:style-name="P1"/>
      <text:h text:style-name="P15" text:outline-level="2" loext:marker-style-name="T17"><text:span text:style-name="T18">條件</text:span><text:span text:style-name="T26">2</text:span><text:span text:style-name="T18">：</text:span><text:span text:style-name="T26">Heap Property</text:span><text:span text:style-name="T18">（堆積性質）</text:span></text:h>
      <text:p text:style-name="P30" loext:marker-style-name="T28"><text:span text:style-name="T29">父節點與子節點之間必須滿足固定的大小關係，分為兩種：</text:span><text:span text:style-name="T28"/>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29" loext:marker-style-name="T5"><text:span text:style-name="T6">類型</text:span><text:span text:style-name="T5"/></text:p>
            </table:table-cell>
            <table:table-cell table:style-name="表格2.A1" office:value-type="string">
              <text:p text:style-name="P29" loext:marker-style-name="T5"><text:span text:style-name="T6">規則</text:span><text:span text:style-name="T5"/></text:p>
            </table:table-cell>
            <table:table-cell table:style-name="表格2.A1" office:value-type="string">
              <text:p text:style-name="P29" loext:marker-style-name="T5"><text:span text:style-name="T6">範例</text:span><text:span text:style-name="T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29" loext:marker-style-name="T42"><text:span text:style-name="T100">Min</text:span><text:span text:style-name="T49"> Heap</text:span></text:p>
          </table:table-cell>
          <table:table-cell table:style-name="表格2.A2" office:value-type="string">
            <text:p text:style-name="P29" loext:marker-style-name="T42"><text:span text:style-name="T49">parent ≤ child</text:span><text:span text:style-name="T43">（</text:span><text:span text:style-name="T38">父小子大</text:span><text:span text:style-name="T43">）</text:span></text:p>
          </table:table-cell>
          <table:table-cell table:style-name="表格2.A2" office:value-type="string">
            <text:p text:style-name="P29" loext:marker-style-name="T42"><text:span text:style-name="T49">Root </text:span><text:span text:style-name="T43">必為最小值</text:span></text:p>
          </table:table-cell>
        </table:table-row>
        <table:table-row table:style-name="表格2.1">
          <table:table-cell table:style-name="表格2.A3" office:value-type="string">
            <text:p text:style-name="P29" loext:marker-style-name="T42"><text:span text:style-name="T116">Max</text:span><text:span text:style-name="T49"> Heap</text:span></text:p>
          </table:table-cell>
          <table:table-cell table:style-name="表格2.A3" office:value-type="string">
            <text:p text:style-name="P29" loext:marker-style-name="T42"><text:span text:style-name="T49">parent ≥ child</text:span><text:span text:style-name="T43">（</text:span><text:span text:style-name="T39">父大子小</text:span><text:span text:style-name="T43">）</text:span></text:p>
          </table:table-cell>
          <table:table-cell table:style-name="表格2.A3" office:value-type="string">
            <text:p text:style-name="P29" loext:marker-style-name="T42"><text:span text:style-name="T49">Root </text:span><text:span text:style-name="T43">必為最大值</text:span></text:p>
          </table:table-cell>
        </table:table-row>
      </table:table>
      <text:p text:style-name="P1"><text:soft-page-break/></text:p>
      <text:p text:style-name="P1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3" loext:marker-style-name="T42"><text:span text:style-name="T49">📌 </text:span><text:span text:style-name="T43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3" loext:marker-style-name="T42"><text:span text:style-name="T50">Heap</text:span><text:span text:style-name="T49"> = </text:span><text:span text:style-name="T125">Complete Binary Tree + Heap Property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二、</text:span><text:span text:style-name="T10">Heap </text:span><text:span text:style-name="T4">的陣列表示法（</text:span><text:span text:style-name="T10">Implicit Array</text:span><text:span text:style-name="T4">）</text:span></text:h>
      <text:p text:style-name="P30" loext:marker-style-name="T28"><text:span text:style-name="T29">由於 </text:span><text:span text:style-name="T132">Heap </text:span><text:span text:style-name="T134">是 </text:span><text:span text:style-name="T132">Complete Binary Tree</text:span><text:span text:style-name="T29">，</text:span><text:span text:style-name="T148">節點位置完全可預測</text:span><text:span text:style-name="T29">，因此不需要指標（</text:span><text:span text:style-name="T44">pointer</text:span><text:span text:style-name="T29">），直接用陣列儲存即可，這稱為 </text:span><text:span text:style-name="T44">Implicit Array</text:span><text:span text:style-name="T29">（隱式陣列）。</text:span></text:p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" loext:marker-style-name="T42"><text:span text:style-name="T43">【索引公式 — 考試必背】</text:span><text:span text:style-name="T42"/></text:p>
          </table:table-cell>
        </table:table-row>
        <table:table-row table:style-name="表格4.1">
          <table:table-cell table:style-name="表格4.A1" office:value-type="string">
            <text:p text:style-name="P3" loext:marker-style-name="T42"><text:span text:style-name="T49"><text:s text:c="2"/>Root <text:s text:c="5"/>→ A[1]</text:span><text:span text:style-name="T42"/></text:p>
          </table:table-cell>
        </table:table-row>
        <table:table-row table:style-name="表格4.1">
          <table:table-cell table:style-name="表格4.A1" office:value-type="string">
            <text:p text:style-name="P3" loext:marker-style-name="T42"><text:span text:style-name="T49"><text:s text:c="2"/></text:span><text:span text:style-name="T157">Parent</text:span><text:span text:style-name="T49"> <text:s text:c="3"/>→ A[</text:span><text:span text:style-name="T90">i / 2</text:span><text:span text:style-name="T49">] <text:s text:c="5"/></text:span><text:span text:style-name="T43">（整數除法）</text:span></text:p>
          </table:table-cell>
        </table:table-row>
        <table:table-row table:style-name="表格4.1">
          <table:table-cell table:style-name="表格4.A1" office:value-type="string">
            <text:p text:style-name="P3" loext:marker-style-name="T42"><text:span text:style-name="T49"><text:s text:c="2"/></text:span><text:span text:style-name="T141">Left child</text:span><text:span text:style-name="T49"> → A[</text:span><text:span text:style-name="T101">2i</text:span><text:span text:style-name="T49">] <text:s text:c="6"/></text:span><text:span text:style-name="T43">（</text:span><text:span text:style-name="T167">多生貴子</text:span><text:span text:style-name="T43">）</text:span></text:p>
          </table:table-cell>
        </table:table-row>
        <table:table-row table:style-name="表格4.1">
          <table:table-cell table:style-name="表格4.A1" office:value-type="string">
            <text:p text:style-name="P3" loext:marker-style-name="T42"><text:span text:style-name="T49"><text:s text:c="2"/></text:span><text:span text:style-name="T141">Right child</text:span><text:span text:style-name="T49"> → A[</text:span><text:span text:style-name="T101">2i + 1</text:span><text:span text:style-name="T49">]</text:span></text:p>
          </table:table-cell>
        </table:table-row>
      </table:table>
      <text:p text:style-name="P1"/>
      <text:h text:style-name="P15" text:outline-level="2" loext:marker-style-name="T17"><text:span text:style-name="T18">範例</text:span><text:span text:style-name="T17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3" loext:marker-style-name="T42"><text:span text:style-name="T43">樹狀結構：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8"/>100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7"/>/ <text:s text:c="2"/>\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5"/>90 <text:s text:c="4"/>80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5"/>/ \ <text:s text:c="4"/>/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/>70 <text:s/>60 50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/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3">陣列儲存：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2"/>Index: <text:s/>1 <text:s text:c="3"/>2 <text:s text:c="3"/>3 <text:s text:c="3"/>4 <text:s text:c="3"/>5 <text:s text:c="3"/>6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2"/>Value: 100 <text:s text:c="2"/>90 <text:s text:c="2"/>80 <text:s text:c="2"/>70 <text:s text:c="2"/>60 <text:s text:c="2"/>50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/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3">驗證：</text:span><text:span text:style-name="T49">A[5] = 60</text:span><text:span text:style-name="T43">，</text:span><text:span text:style-name="T103">Parent = A[5/2] = A[2] </text:span><text:span text:style-name="T49">= 90 ✅</text:span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6"/></text:span><text:span text:style-name="T92">Left child = A[10]</text:span><text:span text:style-name="T43">，</text:span><text:span text:style-name="T169">Right child = A[11]</text:span><text:span text:style-name="T43">（皆為空）</text:span></text:p>
          </table:table-cell>
        </table:table-row>
      </table:table>
      <text:p text:style-name="P1"/>
      <text:p text:style-name="P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3" loext:marker-style-name="T42"><text:span text:style-name="T49">⚠️ <text:s/></text:span><text:span text:style-name="T43">考試陷阱：</text:span><text:span text:style-name="T79">陣列索引從 </text:span><text:span text:style-name="T90">1 </text:span><text:span text:style-name="T79">開始</text:span><text:span text:style-name="T43">，</text:span><text:span text:style-name="T36">不是 </text:span><text:span text:style-name="T50">0</text:span><text:span text:style-name="T43">。</text:span></text:p>
          </table:table-cell>
        </table:table-row>
        <table:table-row table:style-name="表格6.1">
          <table:table-cell table:style-name="表格6.A1" office:value-type="string">
            <text:p text:style-name="P3" loext:marker-style-name="T42"><text:span text:style-name="T49"><text:s text:c="5"/></text:span><text:span text:style-name="T43">若從 </text:span><text:span text:style-name="T49">0 </text:span><text:span text:style-name="T43">開始則公式不同：</text:span><text:span text:style-name="T49">parent=(i-1)/2, left=2i+1, right=2i+2</text:span><text:span text:style-name="T43">。</text:span></text:p>
          </table:table-cell>
        </table:table-row>
        <table:table-row table:style-name="表格6.1">
          <table:table-cell table:style-name="表格6.A1" office:value-type="string">
            <text:p text:style-name="P3" loext:marker-style-name="T42"><text:span text:style-name="T49"><text:s text:c="5"/></text:span><text:span text:style-name="T43">考題若未特別說明，</text:span><text:span text:style-name="T182">預設從 </text:span><text:span text:style-name="T183">1 </text:span><text:span text:style-name="T182">開始</text:span><text:span text:style-name="T43">。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三、</text:span><text:span text:style-name="T10">Heap </text:span><text:span text:style-name="T4">的核心操作與時間複雜度</text:span></text:h>
      <text:h text:style-name="P15" text:outline-level="2" loext:marker-style-name="T17"><text:span text:style-name="T26">3-1 </text:span><text:span text:style-name="T18">插入（</text:span><text:span text:style-name="T26">Insert</text:span><text:span text:style-name="T18">）— </text:span><text:span text:style-name="T26">Bubble Up</text:span><text:span text:style-name="T18">（向上浮）</text:span></text:h>
      <text:p text:style-name="P30" loext:marker-style-name="T28"><text:span text:style-name="T29">步驟：</text:span><text:span text:style-name="T28"/></text:p>
      <text:list xml:id="list153014245431215" text:continue-list="list1392989833" text:style-name="WWNum7">
        <text:list-item>
          <text:p text:style-name="P19" loext:marker-style-name="T34"><text:span text:style-name="T59">Step 1</text:span><text:span text:style-name="T35">：</text:span><text:span text:style-name="T184">將新元素放到陣列最後一個位置</text:span><text:span text:style-name="T35">（</text:span><text:span text:style-name="T59">Complete Binary Tree </text:span><text:span text:style-name="T35">的下一個</text:span><text:span text:style-name="T36">空位</text:span><text:span text:style-name="T35">）。</text:span></text:p>
        </text:list-item>
        <text:list-item text:style-override="WWNum8">
          <text:p text:style-name="P20" loext:marker-style-name="T34"><text:span text:style-name="T59">Step 2</text:span><text:span text:style-name="T35">：</text:span><text:span text:style-name="T160">與父節點比較</text:span><text:span text:style-name="T35">，若違反 </text:span><text:span text:style-name="T59">Heap Property</text:span><text:span text:style-name="T35">，則交換。</text:span></text:p>
        </text:list-item>
        <text:list-item text:style-override="WWNum9">
          <text:p text:style-name="P21" loext:marker-style-name="T34"><text:span text:style-name="T59">Step 3</text:span><text:span text:style-name="T35">：重複 </text:span><text:span text:style-name="T59">Step 2</text:span><text:span text:style-name="T35">，一路往上，直到滿足 </text:span><text:span text:style-name="T59">Heap Property </text:span><text:span text:style-name="T35">或抵達 </text:span><text:span text:style-name="T59">Root </text:span><text:span text:style-name="T35">為止。</text:span></text:p>
        </text:list-item>
      </text:list>
      <text:p text:style-name="P1"/>
      <text:p text:style-name="P32" loext:marker-style-name="T7"><text:span text:style-name="T8">完整範例：</text:span><text:span text:style-name="T12">Max Heap </text:span><text:span text:style-name="T8">插入 </text:span><text:span text:style-name="T12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3" loext:marker-style-name="T42"><text:span text:style-name="T43">原始 </text:span><text:span text:style-name="T49">Max Heap</text:span><text:span text:style-name="T43">：</text:span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8"/>100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7"/>/ <text:s text:c="2"/>\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6"/>90 <text:s text:c="3"/>80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5"/>/ <text:s/>\ <text:s text:c="3"/>/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70 <text:s/>60 50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3">陣列：</text:span><text:span text:style-name="T49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Step 1</text:span><text:span text:style-name="T43">：</text:span><text:span text:style-name="T36">插入 </text:span><text:span text:style-name="T50">95</text:span><text:span text:style-name="T49"> → </text:span><text:span text:style-name="T38">放到 </text:span><text:span text:style-name="T52">index 7</text:span><text:span text:style-name="T38">（最後）</text:span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3">陣列：</text:span><text:span text:style-name="T49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Step 2</text:span><text:span text:style-name="T43">：</text:span><text:span text:style-name="T197">95 </text:span><text:span text:style-name="T198">的 </text:span><text:span text:style-name="T197">parent = A[7/2] = A[3]</text:span><text:span text:style-name="T49"> = 80</text:span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8"/></text:span><text:span text:style-name="T50">95 &gt; 80</text:span><text:span text:style-name="T49"> → </text:span><text:span text:style-name="T43">違反 </text:span><text:span text:style-name="T49">Max Heap → </text:span><text:span text:style-name="T40">交換</text:span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3">陣列：</text:span><text:span text:style-name="T49">[100, 90, </text:span><text:span text:style-name="T54">95</text:span><text:span text:style-name="T49">, 70, 60, 50, </text:span><text:span text:style-name="T54">80</text:span><text:span text:style-name="T49">]</text:span>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Step 3</text:span><text:span text:style-name="T43">：</text:span><text:span text:style-name="T197">95 </text:span><text:span text:style-name="T198">的 </text:span><text:span text:style-name="T197">parent = A[3/2] = A[1]</text:span><text:span text:style-name="T49"> = 100</text:span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7"/></text:span><text:span text:style-name="T50"><text:s/>95 &lt; 100</text:span><text:span text:style-name="T49"> → </text:span><text:span text:style-name="T43">符合 </text:span><text:span text:style-name="T49">Max Heap → </text:span><text:span text:style-name="T40">停止</text:span>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ext:soft-page-break/>
        <table:table-row table:style-name="表格7.1">
          <table:table-cell table:style-name="表格7.A1" office:value-type="string">
            <text:p text:style-name="P3" loext:marker-style-name="T42"><text:span text:style-name="T43">最終結果：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8"/>100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7"/>/ <text:s text:c="2"/>\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5"/>90 <text:s text:c="3"/>95</text:span></text:p>
          </table:table-cell>
        </table:table-row>
        <table:table-row table:style-name="表格7.1">
          <table:table-cell table:style-name="表格7.A1" office:value-type="string">
            <text:p text:style-name="P33" loext:marker-style-name="T42"><text:span text:style-name="T49"><text:s text:c="5"/>/ <text:s/>\ <text:s text:c="2"/>/</text:span><text:span text:style-name="T42"> <text:s text:c="2"/>\</text:span></text:p>
          </table:table-cell>
        </table:table-row>
        <table:table-row table:style-name="表格7.1">
          <table:table-cell table:style-name="表格7.A1" office:value-type="string">
            <text:p text:style-name="P34" loext:marker-style-name="T42"><text:s/><text:span text:style-name="T49">70 <text:s/>60 50 <text:s/>80</text:span></text:p>
          </table:table-cell>
        </table:table-row>
      </table:table>
      <text:p text:style-name="P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3" loext:marker-style-name="T42"><text:span text:style-name="T43">時間複雜度：</text:span><text:span text:style-name="T49">O(log n) <text:s/>← </text:span><text:span text:style-name="T43">最多往上走樹高（</text:span><text:span text:style-name="T49">h = log₂n</text:span><text:span text:style-name="T43">）步</text:span></text:p>
          </table:table-cell>
        </table:table-row>
      </table:table>
      <text:p text:style-name="P1"/>
      <text:p text:style-name="P1"/>
      <text:h text:style-name="P15" text:outline-level="2" loext:marker-style-name="T17"><text:span text:style-name="T26">3-2 </text:span><text:span text:style-name="T80">刪除最大值</text:span><text:span text:style-name="T18">（</text:span><text:span text:style-name="T26">Delete / Extract-Max</text:span><text:span text:style-name="T18">）— </text:span><text:span text:style-name="T26">Heapify</text:span><text:span text:style-name="T18">（向下沉）</text:span></text:h>
      <text:p text:style-name="P30" loext:marker-style-name="T28"><text:span text:style-name="T29">步驟：</text:span><text:span text:style-name="T28"/></text:p>
      <text:list xml:id="list153014341271904" text:continue-list="list153014245431215" text:style-name="WWNum10">
        <text:list-item>
          <text:p text:style-name="P22" loext:marker-style-name="T34"><text:span text:style-name="T59">Step 1</text:span><text:span text:style-name="T35">：</text:span><text:span text:style-name="T184">取出 </text:span><text:span text:style-name="T191">Root</text:span><text:span text:style-name="T184">（最大值）</text:span><text:span text:style-name="T35">。</text:span></text:p>
        </text:list-item>
        <text:list-item text:style-override="WWNum11">
          <text:p text:style-name="P23" loext:marker-style-name="T34"><text:span text:style-name="T59">Step 2</text:span><text:span text:style-name="T35">：</text:span><text:span text:style-name="T136">將陣列最後一個元素移到 </text:span><text:span text:style-name="T141">Root </text:span><text:span text:style-name="T136">位置。</text:span></text:p>
        </text:list-item>
        <text:list-item text:style-override="WWNum12">
          <text:p text:style-name="P24" loext:marker-style-name="T34"><text:span text:style-name="T59">Step 3</text:span><text:span text:style-name="T35">：</text:span><text:span text:style-name="T160">與兩個子節點中</text:span><text:span text:style-name="T200">較大的</text:span><text:span text:style-name="T160">比較</text:span><text:span text:style-name="T35">，若違反 </text:span><text:span text:style-name="T59">Heap Property</text:span><text:span text:style-name="T35">，則交換。</text:span></text:p>
        </text:list-item>
        <text:list-item text:style-override="WWNum13">
          <text:p text:style-name="P25" loext:marker-style-name="T34"><text:span text:style-name="T59">Step 4</text:span><text:span text:style-name="T35">：重複 </text:span><text:span text:style-name="T59">Step 3</text:span><text:span text:style-name="T35">（</text:span><text:span text:style-name="T59">Heapify / Bubble Down</text:span><text:span text:style-name="T35">），一路往下，直到滿足條件或抵達葉節點。</text:span></text:p>
        </text:list-item>
      </text:list>
      <text:p text:style-name="P1"/>
      <text:p text:style-name="P32" loext:marker-style-name="T7"><text:span text:style-name="T8">完整範例：</text:span><text:span text:style-name="T12">Max Heap </text:span><text:span text:style-name="T8">刪除 </text:span><text:span text:style-name="T12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" loext:marker-style-name="T42"><text:span text:style-name="T43">原始 </text:span><text:span text:style-name="T49">Max Heap</text:span><text:span text:style-name="T43">：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9"/>10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8"/>/ <text:s text:c="2"/>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7"/>90 <text:s text:c="3"/>8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6"/>/ \ <text:s text:c="2"/>/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/>70 <text:s/>60 <text:s/>5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Step 1</text:span><text:span text:style-name="T43">：取出 </text:span><text:span text:style-name="T49">Root = 100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Step 2</text:span><text:span text:style-name="T43">：</text:span><text:span text:style-name="T79">把最後元素 </text:span><text:span text:style-name="T90">50 </text:span><text:span text:style-name="T79">移到 </text:span><text:span text:style-name="T90">Root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9"/>5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8"/>/ <text:s/>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7"/>90 <text:s text:c="2"/>8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6"/>/ 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4"/>70 <text:s/>60</text:span><text:span text:style-name="T42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Step 3</text:span><text:span text:style-name="T43">：</text:span><text:span text:style-name="T103">50 </text:span><text:span text:style-name="T105">的子節點 </text:span><text:span text:style-name="T103">90</text:span><text:span text:style-name="T105">、</text:span><text:span text:style-name="T103">80</text:span><text:span text:style-name="T105">，較大為 </text:span><text:span text:style-name="T103">90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8"/>50 &lt; 90 → </text:span><text:span text:style-name="T43">交換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9"/>9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8"/>/ <text:s/>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7"/>50 <text:s text:c="2"/>8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6"/>/ 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4"/>70 <text:s/>6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Step 4</text:span><text:span text:style-name="T43">：</text:span><text:span text:style-name="T103">50 </text:span><text:span text:style-name="T105">的子節點 </text:span><text:span text:style-name="T103">70</text:span><text:span text:style-name="T105">、</text:span><text:span text:style-name="T103">60</text:span><text:span text:style-name="T105">，較大為 </text:span><text:span text:style-name="T103">70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8"/>50 &lt; 70 → </text:span><text:span text:style-name="T43">交換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9"/>9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8"/>/ <text:s/>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7"/>70 <text:s text:c="2"/>8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6"/>/ 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3"/>50 <text:s/>6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Step 5</text:span><text:span text:style-name="T43">：</text:span><text:span text:style-name="T49">50 </text:span><text:span text:style-name="T43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3">最終陣列：</text:span><text:span text:style-name="T49">[90, 70, 80, 50, 60]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" loext:marker-style-name="T42"><text:span text:style-name="T41">時間複雜度：</text:span><text:span text:style-name="T54">O(log n) </text:span><text:span text:style-name="T49"><text:s/>← </text:span><text:span text:style-name="T43">最多往下走樹高（</text:span><text:span text:style-name="T49">h = log₂n</text:span><text:span text:style-name="T43">）步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四、建立 </text:span><text:span text:style-name="T11">Heap</text:span><text:span text:style-name="T4">（</text:span><text:span text:style-name="T10">Build Heap</text:span><text:span text:style-name="T4">）</text:span></text:h>
      <text:h text:style-name="P15" text:outline-level="2" loext:marker-style-name="T17"><text:span text:style-name="T18">方法 </text:span><text:span text:style-name="T27">A</text:span><text:span text:style-name="T18">：逐個插入法</text:span></text:h>
      <text:p text:style-name="P30" loext:marker-style-name="T30"><text:span text:style-name="T31">從</text:span><text:span text:style-name="T81">空</text:span><text:span text:style-name="T31"> </text:span><text:span text:style-name="T45">Heap</text:span><text:span text:style-name="T48"> </text:span><text:span text:style-name="T31">開始，呼叫 </text:span><text:span text:style-name="T109">n </text:span><text:span text:style-name="T106">次 </text:span><text:span text:style-name="T109">Insert</text:span><text:span text:style-name="T31">，每次 </text:span><text:span text:style-name="T194">O(log n)</text:span><text:span text:style-name="T31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" loext:marker-style-name="T42"><text:span text:style-name="T60">總時間：</text:span><text:span text:style-name="T158">n × O(log n)</text:span><text:span text:style-name="T49"> = O(n log n)</text:span></text:p>
          </table:table-cell>
        </table:table-row>
      </table:table>
      <text:p text:style-name="P1"/>
      <text:h text:style-name="P15" text:outline-level="2" loext:marker-style-name="T17"><text:span text:style-name="T18">方法 </text:span><text:span text:style-name="T27">B</text:span><text:span text:style-name="T18">：</text:span><text:span text:style-name="T26">Bottom-Up Build Heap</text:span><text:span text:style-name="T18">（</text:span><text:span text:style-name="T26">Floyd</text:span><text:span text:style-name="T27"> </text:span><text:span text:style-name="T18">演算法）★考試重點★</text:span></text:h>
      <text:p text:style-name="P30" loext:marker-style-name="T30"><text:span text:style-name="T31">直接</text:span><text:span text:style-name="T201">將 </text:span><text:span text:style-name="T207">n </text:span><text:span text:style-name="T201">個元素放入陣列</text:span><text:span text:style-name="T31">，從</text:span><text:span text:style-name="T81">最後一個非葉節點（</text:span><text:span text:style-name="T95">index = ⌊n/2⌋</text:span><text:span text:style-name="T81">）開始</text:span><text:span text:style-name="T31">，</text:span><text:span text:style-name="T161">由下往上</text:span><text:span text:style-name="T31">逐一執行 </text:span><text:span text:style-name="T48">Heapify</text:span><text:span text:style-name="T31">。</text:span></text:p>
      <text:p text:style-name="P1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5" loext:marker-style-name="T209"><text:span text:style-name="T209">★ </text:span><text:span text:style-name="T210">為何從 <text:s text:c="2"/>?</text:span><text:span text:style-name="T209"> <text:s/>⌊n/2⌋ </text:span><text:span text:style-name="T210">開始？</text:span></text:p>
          </table:table-cell>
        </table:table-row>
        <table:table-row table:style-name="表格12.1">
          <table:table-cell table:style-name="表格12.A1" office:value-type="string">
            <text:p text:style-name="P3" loext:marker-style-name="T42"><text:span text:style-name="T90">index &gt; ⌊n/2⌋ </text:span><text:span text:style-name="T91">的節點全部都是葉節點</text:span><text:span text:style-name="T60">（</text:span><text:span text:style-name="T68">無子節點</text:span><text:span text:style-name="T60">），</text:span></text:p>
          </table:table-cell>
        </table:table-row>
        <table:table-row table:style-name="表格12.1">
          <table:table-cell table:style-name="表格12.A1" office:value-type="string">
            <text:p text:style-name="P3" loext:marker-style-name="T42"><text:span text:style-name="T60">葉節點本身已滿足 </text:span><text:span text:style-name="T49">Heap Property(</text:span><text:span text:style-name="T158">Heap Property</text:span><text:span text:style-name="T159">就是比較父節點</text:span><text:span text:style-name="T158">vs</text:span><text:span text:style-name="T159">子節點</text:span><text:span text:style-name="T60">；</text:span><text:span text:style-name="T192">葉節點沒有孩子 → 沒有東西可以比較 </text:span><text:span text:style-name="T43">→ 一定合法</text:span><text:span text:style-name="T60">。</text:span><text:span text:style-name="T49">)</text:span><text:span text:style-name="T60">，不需要 </text:span><text:span text:style-name="T49">Heapify</text:span><text:span text:style-name="T60">。</text:span></text:p>
          </table:table-cell>
        </table:table-row>
        <table:table-row table:style-name="表格12.1">
          <table:table-cell table:style-name="表格12.A1" office:value-type="string">
            <text:p text:style-name="P3" loext:marker-style-name="T42"><text:span text:style-name="T60">因此</text:span><text:span text:style-name="T142">只需從 </text:span><text:span text:style-name="T141">index ⌊n/2⌋ </text:span><text:span text:style-name="T142">往 </text:span><text:span text:style-name="T141">index 1 </text:span><text:span text:style-name="T142">逐一執行</text:span><text:span text:style-name="T60">。</text:span></text:p>
          </table:table-cell>
        </table:table-row>
      </table:table>
      <text:p text:style-name="P1"/>
      <text:p text:style-name="P36" loext:marker-style-name="T30"><text:span text:style-name="T32">範例：將 </text:span><text:span text:style-name="T46">[50, 30, 80, 10, 20, 70, 90] </text:span><text:span text:style-name="T32">建成 </text:span><text:span text:style-name="T46">Max Heap <text:s text:c="61"/></text:span></text:p>
      <text:p text:style-name="P36" loext:marker-style-name="T30"><text:span text:style-name="T46"/></text:p>
      <text:p text:style-name="P36" loext:marker-style-name="T30"><text:span text:style-name="T46">(</text:span><text:span text:style-name="T119">index = ⌊n/2⌋為最後一個非葉節點；index &gt; ⌊n/2⌋ 的節點全部都是葉節點</text:span><text:span text:style-name="T46">)</text:span></text:p>
      <text:p text:style-name="P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3" loext:marker-style-name="T42"><text:span text:style-name="T60">初始陣列（</text:span><text:span text:style-name="T49">index </text:span><text:span text:style-name="T60">從 </text:span><text:span text:style-name="T49">1 </text:span><text:span text:style-name="T60">開始）：</text:span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index</text:span><text:span text:style-name="T60">： <text:s/></text:span><text:span text:style-name="T49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value</text:span><text:span text:style-name="T60">： <text:s/></text:span><text:span text:style-name="T49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3"/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50">n = 7</text:span><text:span text:style-name="T60">，</text:span><text:span text:style-name="T70">最後非葉節點 </text:span><text:span text:style-name="T71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60">（</text:span><text:span text:style-name="T93">index 4</text:span><text:span text:style-name="T94">、</text:span><text:span text:style-name="T93">5</text:span><text:span text:style-name="T94">、</text:span><text:span text:style-name="T93">6</text:span><text:span text:style-name="T94">、</text:span><text:span text:style-name="T93">7 </text:span><text:span text:style-name="T94">皆為葉節點</text:span><text:span text:style-name="T60">，不需 </text:span><text:span text:style-name="T49">Heapify</text:span><text:span text:style-name="T60">）</text:span></text:p>
          </table:table-cell>
        </table:table-row>
        <table:table-row table:style-name="表格13.1">
          <table:table-cell table:style-name="表格13.A1" office:value-type="string">
            <text:p text:style-name="P3"/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60">初始樹狀結構：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<text:s text:c="13"/>50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<text:s text:c="12"/>/ <text:s/>\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<text:s text:c="8"/>30 <text:s text:c="3"/>80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<text:s text:c="7"/>/ \ <text:s text:c="6"/>/ \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<text:s text:c="3"/>10 <text:s/>20 70 <text:s/>90</text:span><text:span text:style-name="T42"/></text:p>
          </table:table-cell>
        </table:table-row>
      </table:table>
      <text:p text:style-name="P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3" loext:marker-style-name="T42"><text:span text:style-name="T49">→</text:span><text:span text:style-name="T61"> </text:span><text:span text:style-name="T153">Heapify(3)</text:span><text:span text:style-name="T154">：</text:span><text:span text:style-name="T153">index 3 = 80</text:span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2"/></text:span><text:span text:style-name="T60">子節點：</text:span><text:span text:style-name="T49">index 6 = 70</text:span><text:span text:style-name="T60">，</text:span><text:span text:style-name="T49">index 7 = 90</text:span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2"/></text:span><text:span text:style-name="T54">Max Heap </text:span><text:span text:style-name="T55">要求父 ≥ 子</text:span><text:span text:style-name="T60">，但 </text:span><text:span text:style-name="T49">80 &lt; 90 → </text:span><text:span text:style-name="T60">違反！</text:span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2"/>80 </text:span><text:span text:style-name="T60">與 </text:span><text:span text:style-name="T49">90 </text:span><text:span text:style-name="T60">交換</text:span></text:p>
          </table:table-cell>
        </table:table-row>
        <table:table-row table:style-name="表格14.1">
          <table:table-cell table:style-name="表格14.A1" office:value-type="string">
            <text:p text:style-name="P3"/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2"/></text:span><text:span text:style-name="T60">交換後：</text:span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13"/>50</text:span><text:span text:style-name="T42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3" loext:marker-style-name="T42"><text:span text:style-name="T49"><text:s text:c="13"/>/ <text:s/>\</text:span><text:span text:style-name="T42"/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8"/>30 <text:s text:c="3"/>90 <text:s text:c="5"/>← 90 </text:span><text:span text:style-name="T60">上來了</text:span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5"/>/ \ <text:s text:c="6"/>/ \</text:span><text:span text:style-name="T42"/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/>10 <text:s/>20 70 <text:s/>80</text:span><text:span text:style-name="T42"/></text:p>
          </table:table-cell>
        </table:table-row>
        <table:table-row table:style-name="表格14.1">
          <table:table-cell table:style-name="表格14.A1" office:value-type="string">
            <text:p text:style-name="P3"/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2"/></text:span><text:span text:style-name="T60">陣列：</text:span><text:span text:style-name="T49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2"/>80 </text:span><text:span text:style-name="T60">已是葉節點 → 停止</text:span></text:p>
          </table:table-cell>
        </table:table-row>
      </table:table>
      <text:p text:style-name="P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3" loext:marker-style-name="T42"><text:span text:style-name="T49">→</text:span><text:span text:style-name="T153"> Heapify(2)</text:span><text:span text:style-name="T154">：</text:span><text:span text:style-name="T153">index 2 = 30</text:span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2"/></text:span><text:span text:style-name="T60">子節點：</text:span><text:span text:style-name="T49">index 4 = 10</text:span><text:span text:style-name="T60">，</text:span><text:span text:style-name="T49">index 5 = 20</text:span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2"/></text:span><text:span text:style-name="T52">30 ≥ 20 </text:span><text:span text:style-name="T53">且 </text:span><text:span text:style-name="T52">30 ≥ 10 → </text:span><text:span text:style-name="T53">符合 </text:span><text:span text:style-name="T52">Max Heap → </text:span><text:span text:style-name="T53">無需交換</text:span></text:p>
          </table:table-cell>
        </table:table-row>
        <table:table-row table:style-name="表格15.1">
          <table:table-cell table:style-name="表格15.A1" office:value-type="string">
            <text:p text:style-name="P3"/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2"/></text:span><text:span text:style-name="T60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11"/>50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10"/>/ <text:s/>\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8"/>30 <text:s text:c="3"/>90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7"/>/ \ <text:s text:c="2"/>/ \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5"/>10 <text:s/>20 70 <text:s/>80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3"/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2"/></text:span><text:span text:style-name="T60">陣列：</text:span><text:span text:style-name="T49">[50, 30, 90, 10, 20, 70, 80]</text:span></text:p>
          </table:table-cell>
        </table:table-row>
      </table:table>
      <text:p text:style-name="P1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3" loext:marker-style-name="T42"><text:span text:style-name="T49">→ </text:span><text:span text:style-name="T153">Heapify(1)</text:span><text:span text:style-name="T154">：</text:span><text:span text:style-name="T153">index 1 = 50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60">子節點：</text:span><text:span text:style-name="T49">index 2 = 30</text:span><text:span text:style-name="T60">，</text:span><text:span text:style-name="T49">index 3 = 90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91">較大子節點</text:span><text:span text:style-name="T60">為 </text:span><text:span text:style-name="T49">90 &gt; 50 → </text:span><text:span text:style-name="T50">50 </text:span><text:span text:style-name="T51">與 </text:span><text:span text:style-name="T50">90 </text:span><text:span text:style-name="T51">交換</text:span></text:p>
          </table:table-cell>
        </table:table-row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60">第 </text:span><text:span text:style-name="T49">1 </text:span><text:span text:style-name="T60">步交換後：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11"/>90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10"/>/ <text:s/>\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8"/>30 <text:s text:c="3"/>50 <text:s text:c="5"/>← </text:span><text:span text:style-name="T56">50 </text:span><text:span text:style-name="T57">下沉到 </text:span><text:span text:style-name="T56">index 3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7"/>/ \ <text:s text:c="2"/>/ \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5"/>10 <text:s/>20 70 <text:s/>80</text:span><text:span text:style-name="T42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60">陣列：</text:span><text:span text:style-name="T49">[90, 30, 50, 10, 20, 70, 80]</text:span></text:p>
          </table:table-cell>
        </table:table-row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191">50 </text:span><text:span text:style-name="T192">繼續下沉</text:span><text:span text:style-name="T60">：子節點 </text:span><text:span text:style-name="T49">index 6 = 70</text:span><text:span text:style-name="T60">，</text:span><text:span text:style-name="T49">index 7 = 80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91">較大子節點</text:span><text:span text:style-name="T60">為 </text:span><text:span text:style-name="T49">80 &gt; 50 → </text:span><text:span text:style-name="T50">50 </text:span><text:span text:style-name="T51">與 </text:span><text:span text:style-name="T50">80 </text:span><text:span text:style-name="T51">交換</text:span></text:p>
          </table:table-cell>
        </table:table-row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60">第 </text:span><text:span text:style-name="T49">2 </text:span><text:span text:style-name="T60">步交換後：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11"/>90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10"/>/ <text:s/>\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8"/>30 <text:s text:c="3"/>80 <text:s text:c="5"/>← 80 </text:span><text:span text:style-name="T60">上來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7"/>/ \ <text:s text:c="6"/>/ \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4"/>10 <text:s/>20 70 <text:s/>50 <text:s text:c="3"/>← 50 </text:span><text:span text:style-name="T60">落到葉節點</text:span></text:p>
          </table:table-cell>
        </table:table-row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50 </text:span><text:span text:style-name="T60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60">陣列：</text:span><text:span text:style-name="T49">[90, 30, 80, 10, 20, 70, 50]</text:span></text:p>
          </table:table-cell>
        </table:table-row>
      </table:table>
      <text:p text:style-name="P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3" loext:marker-style-name="T42"><text:span text:style-name="T60">最終結果：</text:span><text:span text:style-name="T49">Max Heap ✓</text:span></text:p>
          </table:table-cell>
        </table:table-row>
        <table:table-row table:style-name="表格17.1">
          <table:table-cell table:style-name="表格17.A1" office:value-type="string">
            <text:p text:style-name="P3"/>
          </table:table-cell>
        </table:table-row>
        <table:table-row table:style-name="表格17.1">
          <table:table-cell table:style-name="表格17.A1" office:value-type="string">
            <text:p text:style-name="P3" loext:marker-style-name="T42"><text:span text:style-name="T49"><text:s text:c="11"/>90</text:span><text:span text:style-name="T42"/></text:p>
          </table:table-cell>
        </table:table-row>
        <table:table-row table:style-name="表格17.1">
          <table:table-cell table:style-name="表格17.A1" office:value-type="string">
            <text:p text:style-name="P3" loext:marker-style-name="T42"><text:span text:style-name="T49"><text:s text:c="10"/>/ <text:s/>\</text:span><text:span text:style-name="T42"/></text:p>
          </table:table-cell>
        </table:table-row>
        <table:table-row table:style-name="表格17.1">
          <table:table-cell table:style-name="表格17.A1" office:value-type="string">
            <text:p text:style-name="P3" loext:marker-style-name="T42"><text:span text:style-name="T49"><text:s text:c="8"/>30 <text:s text:c="3"/>80</text:span><text:span text:style-name="T42"/></text:p>
          </table:table-cell>
        </table:table-row>
        <table:table-row table:style-name="表格17.1">
          <table:table-cell table:style-name="表格17.A1" office:value-type="string">
            <text:p text:style-name="P3" loext:marker-style-name="T42"><text:span text:style-name="T49"><text:s text:c="7"/>/ \ <text:s text:c="6"/>/ \</text:span></text:p>
          </table:table-cell>
        </table:table-row>
        <table:table-row table:style-name="表格17.1">
          <table:table-cell table:style-name="表格17.A1" office:value-type="string">
            <text:p text:style-name="P3" loext:marker-style-name="T42"><text:span text:style-name="T49"><text:s text:c="3"/>10 <text:s/>20 70 <text:s/>50</text:span></text:p>
          </table:table-cell>
        </table:table-row>
        <table:table-row table:style-name="表格17.1">
          <table:table-cell table:style-name="表格17.A1" office:value-type="string">
            <text:p text:style-name="P3"/>
          </table:table-cell>
        </table:table-row>
        <table:table-row table:style-name="表格17.1">
          <table:table-cell table:style-name="表格17.A1" office:value-type="string">
            <text:p text:style-name="P3" loext:marker-style-name="T42"><text:span text:style-name="T60">陣列：</text:span><text:span text:style-name="T49">[90, 30, 80, 10, 20, 70, 50]</text:span></text:p>
          </table:table-cell>
        </table:table-row>
      </table:table>
      <text:p text:style-name="P1"/>
      <text:h text:style-name="P15" text:outline-level="2" loext:marker-style-name="T17"><text:span text:style-name="T27">★ </text:span><text:span text:style-name="T80">為何 </text:span><text:span text:style-name="T97">Bottom-Up Build Heap</text:span><text:span text:style-name="T98"> =</text:span><text:span text:style-name="T27"> </text:span><text:span text:style-name="T213">O(n)</text:span><text:span text:style-name="T18">？</text:span></text:h>
      <text:p text:style-name="P30" loext:marker-style-name="T30"><text:span text:style-name="T31">關鍵直覺：</text:span><text:span text:style-name="T161">每個節點 </text:span><text:span text:style-name="T165">Heapify </text:span><text:span text:style-name="T161">的代價 </text:span><text:span text:style-name="T165">= </text:span><text:span text:style-name="T161">它在樹中的「高度」</text:span><text:span text:style-name="T31">（</text:span><text:span text:style-name="T135">往下最多能走幾層</text:span><text:span text:style-name="T31">）。</text:span></text:p>
      <text:p text:style-name="P30" loext:marker-style-name="T30"><text:span text:style-name="T107">高度愈低的節點數量愈多，代價愈小；高度愈高的節點數量愈少，代價愈大</text:span><text:span text:style-name="T31">。</text:span><text:span text:style-name="T185">兩者相乘加總後收斂至 </text:span><text:span text:style-name="T194">O(n)</text:span><text:span text:style-name="T31">。</text:span></text:p>
      <text:p text:style-name="P1"/>
      <table:table table:name="表格18" table:style-name="表格18">
        <table:table-column table:style-name="表格18.A"/>
        <text:soft-page-break/>
        <table:table-row table:style-name="表格18.1">
          <table:table-cell table:style-name="表格18.A1" office:value-type="string">
            <text:p text:style-name="P3">★ 為何 Build Heap 是 O(n)？</text:p>
            <text:p text:style-name="P3"/>
            <text:p text:style-name="P3">Build Heap 由下往上<text:span text:style-name="T199">對每個非葉節點執行 Heapify</text:span>。</text:p>
            <text:p text:style-name="P3"/>
            <text:p text:style-name="P3">以完全二元樹為例：</text:p>
            <text:p text:style-name="P3"/>
            <text:p text:style-name="P3"><text:span text:style-name="T215">高度0（葉節點）約有 </text:span><text:span text:style-name="T216">n/2</text:span><text:span text:style-name="T215"> 個</text:span>，<text:span text:style-name="T217">每個最多移動 0 步</text:span></text:p>
            <text:p text:style-name="P3"><text:span text:style-name="T215">高度1 約有 </text:span><text:span text:style-name="T216">n/4</text:span><text:span text:style-name="T215"> 個</text:span>，<text:span text:style-name="T217">每個最多移動 1 步</text:span></text:p>
            <text:p text:style-name="P3"><text:span text:style-name="T215">高度2 約有 </text:span><text:span text:style-name="T216">n/8</text:span><text:span text:style-name="T215"> 個</text:span>，<text:span text:style-name="T217">每個最多移動 2 步</text:span></text:p>
            <text:p text:style-name="P3"><text:span text:style-name="T215">高度3 約有 </text:span><text:span text:style-name="T216">n/16</text:span><text:span text:style-name="T215"> 個</text:span>，<text:span text:style-name="T217">每個最多移動 3 步</text:span></text:p>
            <text:p text:style-name="P3">...</text:p>
            <text:p text:style-name="P3"/>
            <text:p text:style-name="P3">因此總成本為：</text:p>
            <text:p text:style-name="P3"/>
            <text:p text:style-name="P3">T(n) ≈ (n/2)×0</text:p>
            <text:p text:style-name="P3"/>
            <text:p text:style-name="P3">* (n/4)×1</text:p>
            <text:p text:style-name="P3">* (n/8)×2</text:p>
            <text:p text:style-name="P3">* (n/16)×3</text:p>
            <text:p text:style-name="P3">* ...</text:p>
            <text:p text:style-name="P3"/>
            <text:p text:style-name="P3">觀察可知：</text:p>
            <text:p text:style-name="P3"/>
            <text:p text:style-name="P4">越往上，Heapify 可能移動的步數增加 1，</text:p>
            <text:p text:style-name="P3"><text:span text:style-name="T172">但節點數量卻減少一半</text:span>。</text:p>
            <text:p text:style-name="P3"/>
            <text:p text:style-name="P3">例如：</text:p>
            <text:p text:style-name="P3"/>
            <text:p text:style-name="P3">高度1： (<text:span text:style-name="T217">n/4</text:span>)×<text:span text:style-name="T215">1</text:span></text:p>
            <text:p text:style-name="P3">高度2： (<text:span text:style-name="T217">n/8</text:span>)×<text:span text:style-name="T215">2</text:span></text:p>
            <text:p text:style-name="P3">高度3： (<text:span text:style-name="T217">n/16</text:span>)×<text:span text:style-name="T215">3</text:span></text:p>
            <text:p text:style-name="P3"/>
            <text:p text:style-name="P3">可以看到<text:span text:style-name="T126">節點數減少的速度比成本增加的速度更快</text:span>。</text:p>
            <text:p text:style-name="P3"/>
            <text:p text:style-name="P3">因此<text:span text:style-name="T99">所有層的成本加總後不會達到 O(n log n)，而是 O(n)</text:span>。</text:p>
            <text:p text:style-name="P3"/>
            <text:p text:style-name="P3">結論：</text:p>
            <text:p text:style-name="P3"/>
            <text:p text:style-name="P3"><text:span text:style-name="T111">葉節點很多，但幾乎不用移動</text:span>；</text:p>
            <text:p text:style-name="P3"><text:span text:style-name="T173">根附近節點雖然較貴，但數量很少</text:span>。</text:p>
            <text:p text:style-name="P3"/>
            <text:p text:style-name="P3"><text:span text:style-name="T99">所以 </text:span><text:span text:style-name="T174">Build Heap 的時間複雜度為 O(n)</text:span>。</text:p>
          </table:table-cell>
        </table:table-row>
        <table:table-row table:style-name="表格18.1">
          <table:table-cell table:style-name="表格18.A1" office:value-type="string">
            <text:p text:style-name="P3"/>
          </table:table-cell>
        </table:table-row>
        <table:table-row table:style-name="表格18.1">
          <table:table-cell table:style-name="表格18.A1" office:value-type="string">
            <text:p text:style-name="P3" loext:marker-style-name="T42"><text:span text:style-name="T60">白話理解：</text:span><text:span text:style-name="T117">葉節點約佔一半，</text:span><text:span text:style-name="T118">Heapify </text:span><text:span text:style-name="T117">代價為 </text:span><text:span text:style-name="T118">0</text:span><text:span text:style-name="T60">；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3" loext:marker-style-name="T143"><text:span text:style-name="T144">往上每層節點數減半，代價只加 </text:span><text:span text:style-name="T143">1</text:span><text:span text:style-name="T144">。</text:span></text:p>
          </table:table-cell>
        </table:table-row>
        <table:table-row table:style-name="表格18.1">
          <table:table-cell table:style-name="表格18.A1" office:value-type="string">
            <text:p text:style-name="P3" loext:marker-style-name="T42"><text:span text:style-name="T211">整體工作量被大量葉節點的「零代價」攤平</text:span><text:span text:style-name="T60">，總代價 ∝ </text:span><text:span text:style-name="T49">n</text:span><text:span text:style-name="T60">。</text:span></text:p>
          </table:table-cell>
        </table:table-row>
      </table:table>
      <text:p text:style-name="P1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29" loext:marker-style-name="T5"><text:span text:style-name="T6">方法</text:span><text:span text:style-name="T5"/></text:p>
            </table:table-cell>
            <table:table-cell table:style-name="表格19.A1" office:value-type="string">
              <text:p text:style-name="P29" loext:marker-style-name="T5"><text:span text:style-name="T6">時間複雜度</text:span><text:span text:style-name="T5"/></text:p>
            </table:table-cell>
            <table:table-cell table:style-name="表格19.A1" office:value-type="string">
              <text:p text:style-name="P29" loext:marker-style-name="T5"><text:span text:style-name="T6">適用情境</text:span><text:span text:style-name="T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9" loext:marker-style-name="T145"><text:span text:style-name="T146">逐個 </text:span><text:span text:style-name="T145">Insert</text:span></text:p>
          </table:table-cell>
          <table:table-cell table:style-name="表格19.A2" office:value-type="string">
            <text:p text:style-name="P29" loext:marker-style-name="T42"><text:span text:style-name="T49">O(</text:span><text:span text:style-name="T50">n log n</text:span><text:span text:style-name="T49">)</text:span></text:p>
          </table:table-cell>
          <table:table-cell table:style-name="表格19.A2" office:value-type="string">
            <text:p text:style-name="P29" loext:marker-style-name="T42"><text:span text:style-name="T60">動態逐一加入</text:span><text:span text:style-name="T42"/></text:p>
          </table:table-cell>
        </table:table-row>
        <table:table-row table:style-name="表格19.1">
          <table:table-cell table:style-name="表格19.A3" office:value-type="string">
            <text:p text:style-name="P29" loext:marker-style-name="T145"><text:span text:style-name="T145">Bottom-Up Build Heap</text:span><text:span text:style-name="T145"/></text:p>
          </table:table-cell>
          <table:table-cell table:style-name="表格19.A3" office:value-type="string">
            <text:p text:style-name="P29" loext:marker-style-name="T42"><text:span text:style-name="T49">O(</text:span><text:span text:style-name="T50">n</text:span><text:span text:style-name="T49">) ★</text:span></text:p>
          </table:table-cell>
          <table:table-cell table:style-name="表格19.A3" office:value-type="string">
            <text:p text:style-name="P29" loext:marker-style-name="T42"><text:span text:style-name="T60">一次性建立</text:span><text:span text:style-name="T42"/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五、</text:span><text:span text:style-name="T10">Heap Sort</text:span><text:span text:style-name="T4">（堆積排序）</text:span></text:h>
      <text:p text:style-name="P30" loext:marker-style-name="T30"><text:span text:style-name="T48">Heap Sort </text:span><text:span text:style-name="T31">利用 </text:span><text:span text:style-name="T48">Heap </text:span><text:span text:style-name="T31">結構進行排序，分為兩個階段：</text:span></text:p>
      <text:p text:style-name="P1"/>
      <text:list xml:id="list3456818150" text:style-name="WWNum2">
        <text:list-item>
          <text:p text:style-name="P37" loext:marker-style-name="T30"><text:span text:style-name="T48">Phase 1</text:span><text:span text:style-name="T31">：</text:span><text:span text:style-name="T133">Build Heap</text:span><text:span text:style-name="T48"> — </text:span><text:span text:style-name="T218">將原始陣列建成 </text:span><text:span text:style-name="T219">Max Heap</text:span><text:span text:style-name="T31">，時間 </text:span><text:span text:style-name="T48">O(n)</text:span><text:span text:style-name="T31">。</text:span></text:p>
        </text:list-item>
        <text:list-item>
          <text:p text:style-name="P37" loext:marker-style-name="T30"><text:span text:style-name="T48">Phase 2</text:span><text:span text:style-name="T31">：</text:span><text:span text:style-name="T81">反覆 </text:span><text:span text:style-name="T95">Extract-Max</text:span><text:span text:style-name="T48"> — </text:span><text:span text:style-name="T65">取出 </text:span><text:span text:style-name="T72">Root</text:span><text:span text:style-name="T65">（最大值），放到陣列末端</text:span><text:span text:style-name="T31">，</text:span><text:span text:style-name="T33">再 </text:span><text:span text:style-name="T45">Heapify</text:span><text:span text:style-name="T31">，重複 </text:span><text:span text:style-name="T47">n-1</text:span><text:span text:style-name="T48"> </text:span><text:span text:style-name="T31">次，每次 </text:span><text:span text:style-name="T48">O(</text:span><text:span text:style-name="T165">log n</text:span><text:span text:style-name="T48">)</text:span><text:span text:style-name="T31">。</text:span></text:p>
        </text:list-item>
      </text:list>
      <text:p text:style-name="P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3" loext:marker-style-name="T42"><text:span text:style-name="T49">Heap Sort </text:span><text:span text:style-name="T60">總時間 </text:span><text:span text:style-name="T49">= O(</text:span><text:span text:style-name="T50">n</text:span><text:span text:style-name="T49">) + O(</text:span><text:span text:style-name="T50">n log n</text:span><text:span text:style-name="T49">) = O(</text:span><text:span text:style-name="T158">n log n</text:span><text:span text:style-name="T49">)</text:span></text:p>
          </table:table-cell>
        </table:table-row>
        <table:table-row table:style-name="表格20.1">
          <table:table-cell table:style-name="表格20.A1" office:value-type="string">
            <text:p text:style-name="P3" loext:marker-style-name="T42"><text:span text:style-name="T60">空間複雜度 </text:span><text:span text:style-name="T49">= O(1)</text:span><text:span text:style-name="T60">（</text:span><text:span text:style-name="T49">In-place</text:span><text:span text:style-name="T60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3" loext:marker-style-name="T42"><text:span text:style-name="T60">穩定性 </text:span><text:span text:style-name="T49">= </text:span><text:span text:style-name="T60">不穩定（</text:span><text:span text:style-name="T49">Unstable</text:span><text:span text:style-name="T60">）</text:span></text:p>
          </table:table-cell>
        </table:table-row>
      </table:table>
      <text:p text:style-name="P1"/>
      <text:p text:style-name="P30" loext:marker-style-name="T30"><text:span text:style-name="T32">範例：對 </text:span><text:span text:style-name="T46">[4, 2, 7, 1, 5] </text:span><text:span text:style-name="T32">排序</text:span></text:p>
      <text:p text:style-name="P1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3" loext:marker-style-name="T42"><text:span text:style-name="T49">Phase 1 — </text:span><text:span text:style-name="T145">Build Max Heap</text:span><text:span text:style-name="T60">：</text:span></text:p>
          </table:table-cell>
        </table:table-row>
        <table:table-row table:style-name="表格21.1">
          <table:table-cell table:style-name="表格21.A1" office:value-type="string">
            <text:p text:style-name="P3"/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60">原始：</text:span><text:span text:style-name="T49">[4, 2, 7, 1, 5]</text:span></text:p>
          </table:table-cell>
        </table:table-row>
        <table:table-row table:style-name="表格21.1">
          <table:table-cell table:style-name="表格21.A1" office:value-type="string">
            <text:p text:style-name="P3"/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50">n=5</text:span><text:span text:style-name="T60">，</text:span><text:span text:style-name="T102">最後非葉節點 </text:span><text:span text:style-name="T101">= </text:span><text:span text:style-name="T90">⌊5/2⌋ = 2</text:span></text:p>
          </table:table-cell>
        </table:table-row>
        <table:table-row table:style-name="表格21.1">
          <table:table-cell table:style-name="表格21.A1" office:value-type="string">
            <text:p text:style-name="P3"/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60">初始樹狀：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8"/>4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7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5"/></text:span><text:span text:style-name="T90"><text:s/>2</text:span><text:span text:style-name="T49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5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4"/>1 <text:s text:c="2"/>5</text:span><text:span text:style-name="T42"/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3"/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141">Heapify(2)</text:span><text:span text:style-name="T60">：</text:span><text:span text:style-name="T50">2 </text:span><text:span text:style-name="T51">的子節點 </text:span><text:span text:style-name="T50">1, 5</text:span><text:span text:style-name="T60">；</text:span><text:span text:style-name="T158">5 &gt; 2 → </text:span><text:span text:style-name="T159">交換</text:span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8"/>4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7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6"/>5 <text:s text:c="2"/>7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5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4"/>1 <text:s text:c="2"/>2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/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141">Heapify(1)</text:span><text:span text:style-name="T60">：</text:span><text:span text:style-name="T50">4 </text:span><text:span text:style-name="T51">的子節點 </text:span><text:span text:style-name="T50">5, 7</text:span><text:span text:style-name="T60">；</text:span><text:span text:style-name="T158">7 &gt; 4 → </text:span><text:span text:style-name="T159">交換</text:span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8"/>7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7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6"/>5 <text:s text:c="2"/>4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5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4"/>1 <text:s text:c="2"/>2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/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Max Heap </text:span><text:span text:style-name="T60">完成：</text:span><text:span text:style-name="T49">[7, 5, 4, 1, 2]</text:span></text:p>
          </table:table-cell>
        </table:table-row>
      </table:table>
      <text:p text:style-name="P1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3" loext:marker-style-name="T42"><text:span text:style-name="T49">Phase 2 — </text:span><text:span text:style-name="T193">反覆</text:span><text:span text:style-name="T60"> </text:span><text:span text:style-name="T90">Extract-Max</text:span><text:span text:style-name="T60">：</text:span>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Step 1</text:span><text:span text:style-name="T60">：</text:span><text:span text:style-name="T62">取出 </text:span><text:span text:style-name="T63">Root=7</text:span><text:span text:style-name="T62">，末端 </text:span><text:span text:style-name="T63">2 </text:span><text:span text:style-name="T62">移到 </text:span><text:span text:style-name="T63">Root</text:span><text:span text:style-name="T60">，</text:span><text:span text:style-name="T54">Heapify</text:span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2"/>→ [5, 2, 4, 1 | 7]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8"/>5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7"/>/ \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6"/>2 <text:s text:c="2"/>4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5"/>/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4"/>1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Step 2</text:span><text:span text:style-name="T60">：</text:span><text:span text:style-name="T62">取出 </text:span><text:span text:style-name="T63">Root=5</text:span><text:span text:style-name="T62">，末端 </text:span><text:span text:style-name="T63">1 </text:span><text:span text:style-name="T62">移到 </text:span><text:span text:style-name="T63">Root</text:span><text:span text:style-name="T60">，</text:span><text:span text:style-name="T54">Heapify</text:span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2"/>→ [4, 2, 1 | 5, 7]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8"/>4</text:span><text:span text:style-name="T42"/></text:p>
          </table:table-cell>
        </table:table-row>
        <text:soft-page-break/>
        <table:table-row table:style-name="表格22.1">
          <table:table-cell table:style-name="表格22.A1" office:value-type="string">
            <text:p text:style-name="P3" loext:marker-style-name="T42"><text:span text:style-name="T49"><text:s text:c="7"/>/ \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6"/>2 <text:s text:c="2"/>1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Step 3</text:span><text:span text:style-name="T60">：</text:span><text:span text:style-name="T62">取出 </text:span><text:span text:style-name="T63">Root=4</text:span><text:span text:style-name="T62">，末端 </text:span><text:span text:style-name="T63">1 </text:span><text:span text:style-name="T62">移到 </text:span><text:span text:style-name="T63">Root</text:span><text:span text:style-name="T60">，</text:span><text:span text:style-name="T58">Heapify</text:span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2"/>→ [2, 1 | 4, 5, 7]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8"/>2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7"/>/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6"/>1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Step 4</text:span><text:span text:style-name="T60">：</text:span><text:span text:style-name="T62">取出 </text:span><text:span text:style-name="T63">Root=2</text:span><text:span text:style-name="T62">，末端 </text:span><text:span text:style-name="T63">1 </text:span><text:span text:style-name="T62">移到 </text:span><text:span text:style-name="T63">Root</text:span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2"/>→ [1 | 2, 4, 5, 7]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8"/>1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3" loext:marker-style-name="T191"><text:span text:style-name="T192">最終排序（升冪）：</text:span><text:span text:style-name="T191">[1, 2, 4, 5, 7] ✓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六、優先佇列（</text:span><text:span text:style-name="T10">Priority Queue</text:span><text:span text:style-name="T4">）實作方式比較</text:span></text:h>
      <text:p text:style-name="P30" loext:marker-style-name="T30"><text:span text:style-name="T72">Priority Queue</text:span><text:span text:style-name="T65">（優先佇列）</text:span><text:span text:style-name="T31">是</text:span><text:span text:style-name="T135">每次取出「優先值最高」元素的資料結構</text:span><text:span text:style-name="T31">。三種常見實作比較：</text:span></text:p>
      <text:p text:style-name="P1"/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29" loext:marker-style-name="T5"><text:span text:style-name="T6">實作方式</text:span><text:span text:style-name="T5"/></text:p>
            </table:table-cell>
            <table:table-cell table:style-name="表格23.A1" office:value-type="string">
              <text:p text:style-name="P29" loext:marker-style-name="T5"><text:span text:style-name="T13">Insert</text:span><text:span text:style-name="T5"/></text:p>
            </table:table-cell>
            <table:table-cell table:style-name="表格23.A1" office:value-type="string">
              <text:p text:style-name="P5"><text:span text:style-name="T220">Extract-Max</text:span><text:span text:style-name="T222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9" loext:marker-style-name="T42"><text:span text:style-name="T146">排序好的</text:span><text:span text:style-name="T60">陣列</text:span></text:p>
          </table:table-cell>
          <table:table-cell table:style-name="表格23.A2" office:value-type="string">
            <text:p text:style-name="P29" loext:marker-style-name="T42"><text:span text:style-name="T49">O(n)</text:span><text:span text:style-name="T42"/></text:p>
          </table:table-cell>
          <table:table-cell table:style-name="表格23.A2" office:value-type="string">
            <text:p text:style-name="P29" loext:marker-style-name="T42"><text:span text:style-name="T49">O(1) <text:s/></text:span><text:span text:style-name="T60">取快插慢</text:span></text:p>
          </table:table-cell>
        </table:table-row>
        <table:table-row table:style-name="表格23.1">
          <table:table-cell table:style-name="表格23.A2" office:value-type="string">
            <text:p text:style-name="P29" loext:marker-style-name="T42"><text:span text:style-name="T146">未排序的</text:span><text:span text:style-name="T60">陣列</text:span></text:p>
          </table:table-cell>
          <table:table-cell table:style-name="表格23.A2" office:value-type="string">
            <text:p text:style-name="P29" loext:marker-style-name="T42"><text:span text:style-name="T49">O(1)</text:span><text:span text:style-name="T42"/></text:p>
          </table:table-cell>
          <table:table-cell table:style-name="表格23.A2" office:value-type="string">
            <text:p text:style-name="P29" loext:marker-style-name="T42"><text:span text:style-name="T49">O(n) <text:s/></text:span><text:span text:style-name="T60">插快取慢</text:span></text:p>
          </table:table-cell>
        </table:table-row>
        <table:table-row table:style-name="表格23.1">
          <table:table-cell table:style-name="表格23.A4" office:value-type="string">
            <text:p text:style-name="P29" loext:marker-style-name="T42"><text:span text:style-name="T49">Max Heap ★</text:span><text:span text:style-name="T42"/></text:p>
          </table:table-cell>
          <table:table-cell table:style-name="表格23.A4" office:value-type="string">
            <text:p text:style-name="P29" loext:marker-style-name="T158"><text:span text:style-name="T158">O(log n)</text:span><text:span text:style-name="T158"/></text:p>
          </table:table-cell>
          <table:table-cell table:style-name="表格23.A4" office:value-type="string">
            <text:p text:style-name="P29" loext:marker-style-name="T42"><text:span text:style-name="T141">O(log n)</text:span><text:span text:style-name="T49"> <text:s/></text:span><text:span text:style-name="T60">兩者均衡</text:span></text:p>
          </table:table-cell>
        </table:table-row>
      </table:table>
      <text:p text:style-name="P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3" loext:marker-style-name="T42"><text:span text:style-name="T49">💡 </text:span><text:span text:style-name="T60">考試重點：</text:span></text:p>
          </table:table-cell>
        </table:table-row>
        <table:table-row table:style-name="表格24.1">
          <table:table-cell table:style-name="表格24.A1" office:value-type="string">
            <text:p text:style-name="P3" loext:marker-style-name="T42"><text:span text:style-name="T90">Heap </text:span><text:span text:style-name="T91">是 </text:span><text:span text:style-name="T90">Priority Queue </text:span><text:span text:style-name="T91">最常見的實作</text:span><text:span text:style-name="T60">，</text:span></text:p>
          </table:table-cell>
        </table:table-row>
        <table:table-row table:style-name="表格24.1">
          <table:table-cell table:style-name="表格24.A1" office:value-type="string">
            <text:p text:style-name="P3" loext:marker-style-name="T42"><text:span text:style-name="T60">原因是 </text:span><text:span text:style-name="T158">Insert </text:span><text:span text:style-name="T159">和 </text:span><text:span text:style-name="T158">Extract </text:span><text:span text:style-name="T159">都是 </text:span><text:span text:style-name="T158">O(log n)</text:span><text:span text:style-name="T60">，</text:span></text:p>
          </table:table-cell>
        </table:table-row>
        <table:table-row table:style-name="表格24.1">
          <table:table-cell table:style-name="表格24.A1" office:value-type="string">
            <text:p text:style-name="P3" loext:marker-style-name="T42"><text:span text:style-name="T60">是</text:span><text:span text:style-name="T192">三種方案中最均衡的折衷解</text:span><text:span text:style-name="T60">。</text:span></text:p>
          </table:table-cell>
        </table:table-row>
        <table:table-row table:style-name="表格24.1">
          <table:table-cell table:style-name="表格24.A1" office:value-type="string">
            <text:p text:style-name="P3"/>
          </table:table-cell>
        </table:table-row>
        <table:table-row table:style-name="表格24.1">
          <table:table-cell table:style-name="表格24.A1" office:value-type="string">
            <text:p text:style-name="P3" loext:marker-style-name="T42"><text:span text:style-name="T60">應用場景：印表機緩衝（高優先文件先印）、作業系統 </text:span><text:span text:style-name="T49">CPU </text:span><text:span text:style-name="T60">排程。</text:span></text:p>
          </table:table-cell>
        </table:table-row>
      </table:table>
      <text:p text:style-name="P1"/>
      <text:p text:style-name="P1"><text:soft-page-break/>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3" loext:marker-style-name="T42"><text:span text:style-name="T49">① </text:span><text:span text:style-name="T146">排序好的</text:span><text:span text:style-name="T60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Insert 50</text:span><text:span text:style-name="T60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Before: <text:s/>[10, 30, 70, 80]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</text:span><text:span text:style-name="T60">挪動 </text:span><text:span text:style-name="T49">70, 80 </text:span><text:span text:style-name="T60">後</text:span><text:span text:style-name="T49">: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After: <text:s text:c="2"/>[10, 30, </text:span><text:span text:style-name="T54">50</text:span><text:span text:style-name="T49">, 70, 80] <text:s text:c="2"/>← </text:span><text:span text:style-name="T50">O(n)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Extract-Max</text:span><text:span text:style-name="T60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Before: <text:s/>[10, 30, 50, 70, 80]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After: <text:s text:c="2"/>[10, 30, 50, 70] <text:s text:c="2"/></text:span><text:span text:style-name="T60">取出 </text:span><text:span text:style-name="T49">80 <text:s text:c="2"/>←</text:span><text:span text:style-name="T50"> O(1)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② </text:span><text:span text:style-name="T146">未排序的</text:span><text:span text:style-name="T60">陣列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Insert 50</text:span><text:span text:style-name="T60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Before: <text:s/>[80, 10, 30, 70]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After: <text:s text:c="2"/>[80, 10, 30, 70, 50] <text:s text:c="2"/>← </text:span><text:span text:style-name="T50">O(1)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Extract-Max</text:span><text:span text:style-name="T60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Before: <text:s/>[80, 10, 30, 70, 50]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</text:span><text:span text:style-name="T60">掃描</text:span><text:span text:style-name="T49">: 80? 10? 30? 70? 50? <text:s/>→ </text:span><text:span text:style-name="T60">找到 </text:span><text:span text:style-name="T49">80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After: <text:s text:c="2"/>[10, 30, 70, 50] <text:s text:c="2"/></text:span><text:span text:style-name="T60">取出 </text:span><text:span text:style-name="T49">80 <text:s text:c="2"/>← </text:span><text:span text:style-name="T50">O(n)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③ Max Heap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Insert 50</text:span><text:span text:style-name="T60">：放末端，</text:span><text:span text:style-name="T49">Bubble Up </text:span><text:span text:style-name="T60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9"/>80 <text:s text:c="16"/>8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9"/>/ <text:s/>\ <text:s text:c="15"/>/ <text:s text:c="2"/>\</text:span><text:span text:style-name="T42"/></text:p>
          </table:table-cell>
        </table:table-row>
        <text:soft-page-break/>
        <table:table-row table:style-name="表格25.1">
          <table:table-cell table:style-name="表格25.A1" office:value-type="string">
            <text:p text:style-name="P3" loext:marker-style-name="T42"><text:span text:style-name="T49"><text:s text:c="6"/>70 <text:s text:c="2"/>30 <text:s text:c="3"/>→ <text:s/>70 <text:s text:c="2"/>3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6"/>/ <text:s text:c="18"/>/ <text:s text:c="2"/>\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4"/>10 <text:s text:c="14"/>10 <text:s text:c="2"/>50 ← </text:span><text:span text:style-name="T191">50 </text:span><text:span text:style-name="T192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61"/></text:span><text:span text:style-name="T158">O(log n)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35" office:value-type="string">
            <text:p text:style-name="P3"><text:span text:style-name="T49">Extract-Max</text:span><text:span text:style-name="T60">：</text:span><text:span text:style-name="T68">取出 </text:span><text:span text:style-name="T69">Root=80</text:span><text:span text:style-name="T60">，</text:span><text:span text:style-name="T210">末端</text:span><text:span text:style-name="T170"> </text:span><text:span text:style-name="T171">50 </text:span><text:span text:style-name="T210">補位</text:span><text:span text:style-name="T60">，</text:span><text:span text:style-name="T49">Heapify </text:span><text:span text:style-name="T60">往下交換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9"/>80 <text:s text:c="16"/>50 <text:s text:c="17"/>7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8"/>/ <text:s text:c="2"/>\ <text:s text:c="15"/>/ <text:s text:c="2"/>\ <text:s text:c="16"/>/ <text:s text:c="2"/>\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5"/>70 <text:s text:c="2"/>30 <text:s text:c="2"/>→ <text:s text:c="3"/>70 <text:s text:c="2"/>30 <text:s text:c="3"/>→ <text:s text:c="3"/>50 <text:s text:c="2"/>3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5"/>/ <text:s text:c="2"/>\ <text:s text:c="15"/>/ <text:s text:c="20"/>/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10 <text:s text:c="2"/>50 <text:s text:c="9"/>10 <text:s text:c="18"/>1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3"/></text:span><text:span text:style-name="T60">取出 </text:span><text:span text:style-name="T49">80 <text:s text:c="5"/>50 </text:span><text:span text:style-name="T60">移到 </text:span><text:span text:style-name="T49">Root <text:s text:c="4"/>Heapify </text:span><text:span text:style-name="T60">完成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57"/></text:span><text:span text:style-name="T158">O(log n)</text:span></text:p>
          </table:table-cell>
        </table:table-row>
      </table:table>
      <text:p text:style-name="P1"/>
      <text:h text:style-name="P2" text:outline-level="1" loext:marker-style-name="T226"><text:span text:style-name="T227">七、</text:span><text:span text:style-name="T226">Interval Heap</text:span><text:span text:style-name="T227">（區間堆積）【</text:span><text:span text:style-name="T226">110</text:span><text:span text:style-name="T227">地</text:span><text:span text:style-name="T226">Q4</text:span><text:span text:style-name="T227">】</text:span></text:h>
      <text:h text:style-name="P16" text:outline-level="2" loext:marker-style-name="T20"><text:span text:style-name="T20">7-1 <text:s/></text:span><text:span text:style-name="T21">問題起源：</text:span><text:span text:style-name="T22">普通 </text:span><text:span text:style-name="T24">Heap</text:span><text:span text:style-name="T20"> </text:span><text:span text:style-name="T186">只能快速取一端</text:span></text:h>
      <text:p text:style-name="P6" loext:marker-style-name="T228"><text:span text:style-name="T229">回顧你已學過的 </text:span><text:span text:style-name="T228">Max Heap</text:span><text:span text:style-name="T229">：</text:span></text:p>
      <text:p text:style-name="P39" loext:marker-style-name="T262"><text:span text:style-name="T262"><text:s text:c="11"/>100 <text:s text:c="6"/>← </text:span><text:span text:style-name="T263">Root</text:span><text:span text:style-name="T262"> = 全域最大值（</text:span><text:span text:style-name="T263">O(1) 取得</text:span><text:span text:style-name="T262">）</text:span></text:p>
      <text:p text:style-name="P8"><text:s text:c="10"/>/ <text:s text:c="3"/>\</text:p>
      <text:p text:style-name="P7" loext:marker-style-name="T262"><text:span text:style-name="T262"><text:s text:c="8"/>90 <text:s text:c="5"/>80</text:span><text:span text:style-name="T262"/></text:p>
      <text:p text:style-name="P7" loext:marker-style-name="T262"><text:span text:style-name="T262"><text:s text:c="7"/>/ <text:s/>\</text:span><text:span text:style-name="T262"/></text:p>
      <text:p text:style-name="P7" loext:marker-style-name="T262"><text:span text:style-name="T262"><text:s text:c="6"/>70 <text:s text:c="2"/>60</text:span><text:span text:style-name="T262"/></text:p>
      <text:p text:style-name="P7"/>
      <text:p text:style-name="P7" loext:marker-style-name="T262"><text:span text:style-name="T262"><text:s text:c="2"/>Find-Max <text:s/>= O(1) <text:s/>直接</text:span><text:span text:style-name="T263">看 Root</text:span></text:p>
      <text:p text:style-name="P41" loext:marker-style-name="T262"><text:span text:style-name="T262"><text:s text:c="2"/></text:span><text:span text:style-name="T73">Find-Min <text:s/>= O(n)</text:span><text:span text:style-name="T262"> <text:s/></text:span><text:span text:style-name="T271">最小值藏在某個葉節點，不知在哪，</text:span><text:span text:style-name="T214">只能全掃</text:span></text:p>
      <text:p text:style-name="P9"/>
      <text:p text:style-name="P6" loext:marker-style-name="T228"><text:span text:style-name="T228">Max Heap </text:span><text:span text:style-name="T229">有一個致命弱點：</text:span></text:p>
      <text:list text:style-name="WWNum14">
        <text:list-item>
          <text:p text:style-name="P26" loext:marker-style-name="T228"><text:span text:style-name="T229">取最大值 → </text:span><text:span text:style-name="T228">O(1)</text:span><text:span text:style-name="T229">，非常快，因為 </text:span><text:span text:style-name="T228">Root </text:span><text:span text:style-name="T229">就是最大值。</text:span></text:p>
        </text:list-item>
        <text:list-item>
          <text:p text:style-name="P26" loext:marker-style-name="T228"><text:span text:style-name="T66">取最小值 → </text:span><text:span text:style-name="T67">O(n)</text:span><text:span text:style-name="T229">，</text:span><text:span text:style-name="T82">非常慢，因為最小值可能藏在任何一個葉節點，沒有規律可循。</text:span></text:p>
        </text:list-item>
      </text:list>
      <text:p text:style-name="P9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" loext:marker-style-name="T230"><text:span text:style-name="T230">❓ </text:span><text:span text:style-name="T231">想一想：最小值在哪裡？</text:span></text:p>
            <text:p text:style-name="P9" loext:marker-style-name="T245"><text:span text:style-name="T246">以上面的 </text:span><text:span text:style-name="T245">Max Heap </text:span><text:span text:style-name="T246">為例，最小值 </text:span><text:span text:style-name="T245">60 </text:span><text:span text:style-name="T246">藏在葉節點。</text:span></text:p>
            <text:p text:style-name="P43" loext:marker-style-name="T245"><text:span text:style-name="T246">如果樹有 </text:span><text:span text:style-name="T245">n </text:span><text:span text:style-name="T246">個節點，不掃到最後一層根本不知道最小值在哪。</text:span></text:p>
          </table:table-cell>
        </table:table-row>
      </table:table>
      <text:p text:style-name="P10"><text:soft-page-break/></text:p>
      <text:h text:style-name="P16" text:outline-level="2" loext:marker-style-name="T20"><text:span text:style-name="T20">7-2 <text:s/></text:span><text:span text:style-name="T22">現實需求</text:span><text:span text:style-name="T21">：</text:span><text:span text:style-name="T186">兩端都要快</text:span></text:h>
      <text:p text:style-name="P6" loext:marker-style-name="T228"><text:span text:style-name="T229">在</text:span><text:span text:style-name="T232">很多實際應用中</text:span><text:span text:style-name="T229">，我們</text:span><text:span text:style-name="T137">同時需要快速取出最大值和最小值</text:span><text:span text:style-name="T229">：</text:span></text:p>
      <text:p text:style-name="P9"/>
      <text:p text:style-name="P39" loext:marker-style-name="T262"><text:span text:style-name="T262"><text:s text:c="2"/>📈 股票交易系統：</text:span><text:span text:style-name="T262"/></text:p>
      <text:p text:style-name="P7" loext:marker-style-name="T262"><text:span text:style-name="T262"><text:s text:c="7"/>→ 最高價（最大值）O(1) 快速取得</text:span><text:span text:style-name="T262"/></text:p>
      <text:p text:style-name="P7" loext:marker-style-name="T262"><text:span text:style-name="T262"><text:s text:c="7"/>→ 最低價（最小值）O(1) 快速取得</text:span><text:span text:style-name="T262"/></text:p>
      <text:p text:style-name="P7"/>
      <text:p text:style-name="P7" loext:marker-style-name="T262"><text:span text:style-name="T262"><text:s text:c="2"/>🖥️ <text:s/>CPU 排程器（雙優先權模式）：</text:span><text:span text:style-name="T262"/></text:p>
      <text:p text:style-name="P7" loext:marker-style-name="T262"><text:span text:style-name="T262"><text:s text:c="7"/>→ 最高優先權工作 <text:s/>→ 優先執行</text:span><text:span text:style-name="T262"/></text:p>
      <text:p text:style-name="P7" loext:marker-style-name="T262"><text:span text:style-name="T262"><text:s text:c="7"/>→ 最低優先權工作 <text:s/>→ 必要時踢出讓位</text:span><text:span text:style-name="T262"/></text:p>
      <text:p text:style-name="P7"/>
      <text:p text:style-name="P7" loext:marker-style-name="T262"><text:span text:style-name="T262"><text:s text:c="2"/>❌ </text:span><text:span text:style-name="T263">普通 Max Heap</text:span><text:span text:style-name="T262"> 做不到：</text:span><text:span text:style-name="T166">找最小值要</text:span><text:span text:style-name="T214"> O(n)</text:span></text:p>
      <text:p text:style-name="P41" loext:marker-style-name="T262"><text:span text:style-name="T262"><text:s text:c="2"/>❌ </text:span><text:span text:style-name="T263">普通 Min Heap</text:span><text:span text:style-name="T262"> 做不到：</text:span><text:span text:style-name="T166">找最大值要</text:span><text:span text:style-name="T214"> O(n)</text:span></text:p>
      <text:p text:style-name="P9"/>
      <text:p text:style-name="P6" loext:marker-style-name="T228"><text:span text:style-name="T229">這類需求稱為 </text:span><text:span text:style-name="T228">Double-Ended Priority Queue</text:span><text:span text:style-name="T229">（</text:span><text:span text:style-name="T228">DEPQ</text:span><text:span text:style-name="T229">，</text:span><text:span text:style-name="T108">雙端優先佇列</text:span><text:span text:style-name="T229">），</text:span><text:span text:style-name="T82">目標是</text:span><text:span text:style-name="T229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9" loext:marker-style-name="T230"><text:span text:style-name="T230">Extract-Min</text:span><text:span text:style-name="T231">（</text:span><text:span text:style-name="T187">取出最小值</text:span><text:span text:style-name="T231">）</text:span><text:span text:style-name="T230">= </text:span><text:span text:style-name="T189">O(log n)</text:span></text:p>
            <text:p text:style-name="P43" loext:marker-style-name="T230"><text:span text:style-name="T230">Extract-Max</text:span><text:span text:style-name="T231">（</text:span><text:span text:style-name="T187">取出最大值</text:span><text:span text:style-name="T231">）</text:span><text:span text:style-name="T230">= </text:span><text:span text:style-name="T189">O(log n)</text:span></text:p>
          </table:table-cell>
        </table:table-row>
      </table:table>
      <text:p text:style-name="P10"/>
      <text:h text:style-name="P16" text:outline-level="2" loext:marker-style-name="T20"><text:span text:style-name="T20">7-3 <text:s/>Interval Heap </text:span><text:span text:style-name="T21">的核心設計</text:span></text:h>
      <text:p text:style-name="P6" loext:marker-style-name="T228"><text:span text:style-name="T234">Interval Heap </text:span><text:span text:style-name="T235">的靈感</text:span><text:span text:style-name="T229">：</text:span><text:span text:style-name="T82">把 </text:span><text:span text:style-name="T84">Min Heap </text:span><text:span text:style-name="T82">和 </text:span><text:span text:style-name="T84">Max Heap</text:span><text:span text:style-name="T202">「疊」在同一棵樹上</text:span><text:span text:style-name="T229">。</text:span></text:p>
      <text:p text:style-name="P6" loext:marker-style-name="T228"><text:span text:style-name="T247">具體做法：</text:span><text:span text:style-name="T162">每個節點不再存一個值</text:span><text:span text:style-name="T229">，</text:span><text:span text:style-name="T137">改成存一個「區間」</text:span><text:span text:style-name="T138">[min_val, max_val]</text:span><text:span text:style-name="T229">：</text:span></text:p>
      <text:p text:style-name="P39" loext:marker-style-name="T262"><text:span text:style-name="T262"><text:s text:c="2"/></text:span><text:span text:style-name="T264">普通</text:span><text:span text:style-name="T262"> Heap 節點： <text:s text:c="9"/>Interval Heap 節點：</text:span></text:p>
      <text:p text:style-name="P7" loext:marker-style-name="T262"><text:span text:style-name="T262"><text:s text:c="7"/></text:span><text:span text:style-name="T263">80</text:span><text:span text:style-name="T262"> <text:s text:c="23"/></text:span><text:span text:style-name="T263">[20, 80]</text:span></text:p>
      <text:p text:style-name="P8"><text:s text:c="34"/>左值 <text:s/>右值</text:p>
      <text:p text:style-name="P7" loext:marker-style-name="T262"><text:span text:style-name="T262"><text:s text:c="30"/>（小的） <text:s/>（大的）</text:span><text:span text:style-name="T262"/></text:p>
      <text:p text:style-name="P7"/>
      <text:p text:style-name="P41" loext:marker-style-name="T262"><text:span text:style-name="T262"><text:s text:c="2"/>規則：</text:span><text:span text:style-name="T273">每個節點的 左值 ≤ 右值</text:span><text:span text:style-name="T274"> </text:span><text:span text:style-name="T262">（必須成立）</text:span></text:p>
      <text:p text:style-name="P9"/>
      <text:p text:style-name="P6" loext:marker-style-name="T228"><text:span text:style-name="T237">兩個 </text:span><text:span text:style-name="T238">Heap </text:span><text:span text:style-name="T237">的同時維護</text:span><text:span text:style-name="T229">：</text:span></text:p>
      <text:list text:continue-numbering="true" text:style-name="WWNum14">
        <text:list-item>
          <text:p text:style-name="P26" loext:marker-style-name="T228"><text:span text:style-name="T232">所有節點的</text:span><text:span text:style-name="T120">左</text:span><text:span text:style-name="T232">值（</text:span><text:span text:style-name="T233">min </text:span><text:span text:style-name="T232">端）</text:span><text:span text:style-name="T229">— 自上而下形成一個 </text:span><text:span text:style-name="T121">Min Heap</text:span></text:p>
        </text:list-item>
        <text:list-item>
          <text:p text:style-name="P26" loext:marker-style-name="T228"><text:span text:style-name="T232">所有節點的</text:span><text:span text:style-name="T149">右</text:span><text:span text:style-name="T232">值（</text:span><text:span text:style-name="T233">max </text:span><text:span text:style-name="T232">端</text:span><text:span text:style-name="T229">）— 自上而下形成一個 </text:span><text:span text:style-name="T150">Max Heap</text:span></text:p>
        </text:list-item>
      </text:list>
      <text:p text:style-name="P9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9" loext:marker-style-name="T230"><text:span text:style-name="T230">Interval Heap = </text:span><text:span text:style-name="T122">Min Heap</text:span><text:span text:style-name="T123">（左值）</text:span><text:span text:style-name="T230">+</text:span><text:span text:style-name="T150"> Max Heap</text:span><text:span text:style-name="T151">（右值）</text:span><text:span text:style-name="T275">同時疊在一棵樹上</text:span></text:p>
          </table:table-cell>
        </table:table-row>
      </table:table>
      <text:p text:style-name="P10"/>
      <text:h text:style-name="P16" text:outline-level="2" loext:marker-style-name="T20"><text:span text:style-name="T20">7-4 <text:s/></text:span><text:span text:style-name="T21">整棵樹的結構解析</text:span></text:h>
      <text:p text:style-name="P39" loext:marker-style-name="T262"><text:span text:style-name="T262"><text:s text:c="14"/>[</text:span><text:span text:style-name="T264">10</text:span><text:span text:style-name="T262">, </text:span><text:span text:style-name="T147">100</text:span><text:span text:style-name="T262">] <text:s text:c="9"/>← Root</text:span></text:p>
      <text:p text:style-name="P7" loext:marker-style-name="T262"><text:span text:style-name="T262"><text:s text:c="13"/>/ <text:s text:c="9"/>\</text:span><text:span text:style-name="T262"/></text:p>
      <text:p text:style-name="P41" loext:marker-style-name="T262"><text:soft-page-break/><text:span text:style-name="T262"><text:s text:c="8"/>[</text:span><text:span text:style-name="T264">20</text:span><text:span text:style-name="T262">, </text:span><text:span text:style-name="T147">80</text:span><text:span text:style-name="T262">] <text:s text:c="5"/>[</text:span><text:span text:style-name="T264">30</text:span><text:span text:style-name="T262">, </text:span><text:span text:style-name="T147">90</text:span><text:span text:style-name="T262">]</text:span></text:p>
      <text:p text:style-name="P9"/>
      <text:p text:style-name="P6" loext:marker-style-name="T228"><text:span text:style-name="T229">拆開來看左右兩個 </text:span><text:span text:style-name="T228">Heap</text:span><text:span text:style-name="T229">：</text:span></text:p>
      <text:p text:style-name="P39" loext:marker-style-name="T262"><text:span text:style-name="T262"><text:s text:c="2"/></text:span><text:span text:style-name="T272">左值（min 端）形成 Min Heap</text:span><text:span text:style-name="T262">： <text:s text:c="2"/></text:span><text:span text:style-name="T195">右值（max 端）形成 Max Heap</text:span><text:span text:style-name="T262">：</text:span></text:p>
      <text:p text:style-name="P7"/>
      <text:p text:style-name="P7" loext:marker-style-name="T262"><text:span text:style-name="T262"><text:s text:c="10"/>10 <text:s text:c="30"/>100</text:span><text:span text:style-name="T262"/></text:p>
      <text:p text:style-name="P7" loext:marker-style-name="T262"><text:span text:style-name="T262"><text:s text:c="9"/>/ <text:s/>\ <text:s text:c="28"/>/ <text:s text:c="3"/>\</text:span><text:span text:style-name="T262"/></text:p>
      <text:p text:style-name="P7" loext:marker-style-name="T262"><text:span text:style-name="T262"><text:s text:c="8"/>20 <text:s/>30 <text:s text:c="26"/>80 <text:s text:c="4"/>90</text:span><text:span text:style-name="T262"/></text:p>
      <text:p text:style-name="P7"/>
      <text:p text:style-name="P41" loext:marker-style-name="T262"><text:span text:style-name="T262"><text:s text:c="2"/>驗證 Min Heap：10 ≤ 20 ✓ <text:s/>10 ≤ 30 ✓ <text:s text:c="2"/>驗證 Max Heap：100 ≥ 80 ✓ <text:s/>100 ≥ 90 ✓</text:span><text:span text:style-name="T262"/></text:p>
      <text:p text:style-name="P9"/>
      <text:p text:style-name="P6" loext:marker-style-name="T228"><text:span text:style-name="T229">因此：</text:span><text:span text:style-name="T228"/></text:p>
      <text:list text:continue-numbering="true" text:style-name="WWNum14">
        <text:list-item>
          <text:p text:style-name="P26" loext:marker-style-name="T228"><text:span text:style-name="T233">Root </text:span><text:span text:style-name="T232">的</text:span><text:span text:style-name="T120">左</text:span><text:span text:style-name="T232">值</text:span><text:span text:style-name="T229"> </text:span><text:span text:style-name="T228">= </text:span><text:span text:style-name="T124">Min</text:span><text:span text:style-name="T228"> Heap </text:span><text:span text:style-name="T229">的 </text:span><text:span text:style-name="T228">Root = </text:span><text:span text:style-name="T276">全域最小值</text:span><text:span text:style-name="T229"> </text:span><text:span text:style-name="T228">= 10 <text:s/>→</text:span><text:span text:style-name="T175"> <text:s/>Find-Min = O(1)</text:span></text:p>
        </text:list-item>
        <text:list-item>
          <text:p text:style-name="P26" loext:marker-style-name="T228"><text:span text:style-name="T233">Root </text:span><text:span text:style-name="T232">的</text:span><text:span text:style-name="T149">右</text:span><text:span text:style-name="T232">值</text:span><text:span text:style-name="T229"> </text:span><text:span text:style-name="T228">= </text:span><text:span text:style-name="T152">Max</text:span><text:span text:style-name="T228"> Heap </text:span><text:span text:style-name="T229">的 </text:span><text:span text:style-name="T228">Root = </text:span><text:span text:style-name="T277">全域最大值</text:span><text:span text:style-name="T229"> </text:span><text:span text:style-name="T228">= 100 <text:s/>→ </text:span><text:span text:style-name="T175"><text:s/>Find-Max = O(1)</text:span></text:p>
        </text:list-item>
      </text:list>
      <text:p text:style-name="P9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9" loext:marker-style-name="T230"><text:span text:style-name="T230">🎯 Interval Heap </text:span><text:span text:style-name="T231">的核心價值</text:span></text:p>
            <text:p text:style-name="P9" loext:marker-style-name="T245"><text:span text:style-name="T139">Root </text:span><text:span text:style-name="T140">節點</text:span><text:span text:style-name="T187">同時持有全域最小值（左值）和全域最大值（右值）</text:span><text:span text:style-name="T246">，</text:span></text:p>
            <text:p text:style-name="P43" loext:marker-style-name="T245"><text:span text:style-name="T239">無論取哪一端</text:span><text:span text:style-name="T246">，</text:span><text:span text:style-name="T82">都能 </text:span><text:span text:style-name="T84">O(1) </text:span><text:span text:style-name="T82">找到、</text:span><text:span text:style-name="T177">O(log n) </text:span><text:span text:style-name="T178">取出</text:span><text:span text:style-name="T82">。</text:span></text:p>
          </table:table-cell>
        </table:table-row>
      </table:table>
      <text:p text:style-name="P10"/>
      <text:h text:style-name="P15" text:outline-level="2" loext:marker-style-name="T17"><text:span text:style-name="T18">7-4.5 <text:s/></text:span><text:span text:style-name="T164">Find 找到 vs. Extract 取出</text:span><text:span text:style-name="T18">：</text:span><text:span text:style-name="T206">為何一個 O(1)、一個 O(log n)</text:span><text:span text:style-name="T18">？</text:span></text:h>
      <text:p text:style-name="P30" loext:marker-style-name="T278"><text:span text:style-name="T279">這是很多人第一次接觸 Heap 時最容易混淆的地方。關鍵在於：</text:span><text:span text:style-name="T110">「找到（Find/Peek）」和「取出（Extract/Delete）」是完全不同的兩件事。</text:span></text:p>
      <text:p text:style-name="P10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3" loext:marker-style-name="T5"><text:span text:style-name="T14">先用普通 Max Heap 建立直覺</text:span><text:span text:style-name="T5"/></text:p>
          </table:table-cell>
        </table:table-row>
        <table:table-row table:style-name="表格30.1">
          <table:table-cell table:style-name="表格30.A1" office:value-type="string">
            <text:p text:style-name="P3"/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11"/>100 <text:s text:c="2"/>← Root = 全域最大值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10"/>/ <text:s text:c="2"/>\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8"/>90 <text:s text:c="3"/>80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7"/>/ \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5"/>70 <text:s/>60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/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Find-Max（找最大值）= O(1)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2"/>→ 直接讀 Root，什麼都不用動。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/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Extract-Max（取出最大值）= O(log n)</text:span><text:span text:style-name="T42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3" loext:marker-style-name="T42"><text:span text:style-name="T49"><text:s text:c="2"/>→ </text:span><text:span text:style-name="T191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4"/>1. </text:span><text:span text:style-name="T281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4"/>2. </text:span><text:span text:style-name="T155">Heap Property（父 ≥ 子）不能違反</text:span></text:p>
          </table:table-cell>
        </table:table-row>
      </table:table>
      <text:p text:style-name="P10"/>
      <text:p text:style-name="P30" loext:marker-style-name="T278"><text:span text:style-name="T96">「取出」的代價遠比「找到」高，是因為</text:span><text:span text:style-name="T208">刪除 Root 後必須完整修復整棵樹的結構。</text:span><text:span text:style-name="T279">流程如下：</text:span></text:p>
      <text:p text:style-name="P10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3" loext:marker-style-name="T42"><text:span text:style-name="T49">Extract-Max 完整流程（以上面的 Max Heap 為例）：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Step 1：取出 Root = 10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Step 2：把最後元素（葉節點最右端）60 搬到 Root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9"/>60 <text:s text:c="2"/>← 60 補位後，Heap Property 壞掉了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8"/>/ <text:s/>\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7"/>90 <text:s/>8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6"/>/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5"/>7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Step 3：60 &lt; 90，違反 Max Heap → 與較大子節點 90 交換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9"/>9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8"/>/ <text:s/>\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7"/>60 <text:s/>8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6"/>/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5"/>7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Step 4：60 &lt; 70，仍違反 → 再往下交換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9"/>9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8"/>/ <text:s/>\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7"/>70 <text:s/>80</text:span><text:span text:style-name="T42"/></text:p>
          </table:table-cell>
        </table:table-row>
        <text:soft-page-break/>
        <table:table-row table:style-name="表格31.1">
          <table:table-cell table:style-name="表格31.A1" office:value-type="string">
            <text:p text:style-name="P3" loext:marker-style-name="T42"><text:span text:style-name="T49"><text:s text:c="6"/>/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5"/>60 <text:s text:c="2"/>← 60 最終落到葉節點，停止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這個「一路往下修正」的過程稱為 Heapify Down（向下沉）。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157">最壞情況需走完整棵樹的高度 h = log₂n</text:span><text:span text:style-name="T49">，因此 </text:span><text:span text:style-name="T209">O(log n)</text:span><text:span text:style-name="T49">。</text:span></text:p>
          </table:table-cell>
        </table:table-row>
      </table:table>
      <text:p text:style-name="P10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3" loext:marker-style-name="T5"><text:span text:style-name="T14">直覺比喻：</text:span><text:span text:style-name="T5"/></text:p>
          </table:table-cell>
        </table:table-row>
        <table:table-row table:style-name="表格32.1">
          <table:table-cell table:style-name="表格32.A1" office:value-type="string">
            <text:p text:style-name="P3"/>
          </table:table-cell>
        </table:table-row>
        <table:table-row table:style-name="表格32.1">
          <table:table-cell table:style-name="表格32.A1" office:value-type="string">
            <text:p text:style-name="P3" loext:marker-style-name="T42"><text:span text:style-name="T49"><text:s text:c="2"/>Find <text:s text:c="2"/>= 看書架最上面那本書 → O(1)，就在眼前，看一眼即可。</text:span><text:span text:style-name="T42"/></text:p>
          </table:table-cell>
        </table:table-row>
        <table:table-row table:style-name="表格32.1">
          <table:table-cell table:style-name="表格32.A1" office:value-type="string">
            <text:p text:style-name="P3" loext:marker-style-name="T42"><text:span text:style-name="T49"><text:s text:c="2"/></text:span><text:span text:style-name="T50">Extract</text:span><text:span text:style-name="T49"> = </text:span><text:span text:style-name="T168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3" loext:marker-style-name="T42"><text:span text:style-name="T49"><text:s text:c="11"/></text:span><text:span text:style-name="T191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3" loext:marker-style-name="T42"><text:span text:style-name="T49"><text:s text:c="12"/></text:span><text:span text:style-name="T90">這個「整理」的工作量才是 O(log n) 的真正來源。</text:span></text:p>
          </table:table-cell>
        </table:table-row>
      </table:table>
      <text:p text:style-name="P10"/>
      <text:h text:style-name="P15" text:outline-level="2" loext:marker-style-name="T17"><text:span text:style-name="T18">7-4.6 <text:s/>Interval Heap 的 Extract-Min 與 Extract-Max 完整示範</text:span><text:span text:style-name="T17"/></text:h>
      <text:p text:style-name="P30" loext:marker-style-name="T278"><text:span text:style-name="T280">Interval Heap 的 Extract 操作，本質上就是普通 Heap 的 Heapify Down</text:span><text:span text:style-name="T279">，只是</text:span><text:span text:style-name="T179">同時維護 Min 端和 Max 端兩條性質</text:span><text:span text:style-name="T279">。以下用同一棵初始樹，分別展示兩種操作。</text:span></text:p>
      <text:p text:style-name="P10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3" loext:marker-style-name="T5"><text:span text:style-name="T14">初始 Interval Heap：</text:span><text:span text:style-name="T5"/></text:p>
          </table:table-cell>
        </table:table-row>
        <table:table-row table:style-name="表格33.1">
          <table:table-cell table:style-name="表格33.A1" office:value-type="string">
            <text:p text:style-name="P3"/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<text:s text:c="13"/>[10, 100] <text:s text:c="6"/>← Root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<text:s text:c="12"/>/ <text:s text:c="9"/>\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<text:s text:c="7"/>[20, 80] <text:s text:c="5"/>[30, 90]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3"/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左值（min 端）形成 Min Heap： <text:s/>10 ≤ 20，10 ≤ 30 ✓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右值（max 端）形成 Max Heap： <text:s/>100 ≥ 80，100 ≥ 90 ✓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3"/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全域最小值 = Root 左值 = 10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全域最大值 = Root 右值 = 100</text:span><text:span text:style-name="T42"/></text:p>
          </table:table-cell>
        </table:table-row>
      </table:table>
      <text:p text:style-name="P10"/>
      <text:h text:style-name="P15" text:outline-level="2" loext:marker-style-name="T17"><text:span text:style-name="T18"><text:s text:c="2"/>一、Extract-Min（</text:span><text:span text:style-name="T19">取出最小值 10</text:span><text:span text:style-name="T18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3" loext:marker-style-name="T42"><text:span text:style-name="T49">Step 1：</text:span><text:span text:style-name="T284">取出 Root 左值（最小值）= 10</text:span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3" loext:marker-style-name="T42"><text:span text:style-name="T49"><text:s text:c="8"/>Root 左側空洞，需要補位。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[ ?, 10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/ <text:s text:c="7"/>\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6"/>[20, 80] <text:s text:c="3"/>[30, 9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Step 2：補位規則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8"/>把最後節點（[30, 90]）整體移除，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8"/>取其 min 端（30）補到 Root 的左值位置。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8"/>（補 min 端修的是 Min Heap；補 max 端修的是 Max Heap）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[30, 10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/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6"/>[20, 8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Step 3：檢查 Min Heap 性質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8"/>Root min = 30，Child min = 20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8"/></text:span><text:span text:style-name="T118">30 &gt; 20 → 違反 Min Heap（父 ≤ 子）</text:span><text:span text:style-name="T49">→ </text:span><text:span text:style-name="T93">交換 min 端</text:span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Step 4：Heapify Down（min 端下沉）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[20, 10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/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6"/>[30, 8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8"/>20 ≤ 30 → 合法，停止。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最終結果：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[20, 10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/</text:span><text:span text:style-name="T42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3" loext:marker-style-name="T42"><text:span text:style-name="T49"><text:s text:c="6"/>[30, 8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成功取出最小值 10，</text:span><text:span text:style-name="T191">Min Heap 與 Max Heap 性質皆完整恢復</text:span><text:span text:style-name="T49">。</text:span></text:p>
          </table:table-cell>
        </table:table-row>
      </table:table>
      <text:p text:style-name="P10"/>
      <text:h text:style-name="P15" text:outline-level="2" loext:marker-style-name="T17"><text:span text:style-name="T18"><text:s text:c="2"/>二、Extract-Max（</text:span><text:span text:style-name="T19">取出最大值 100</text:span><text:span text:style-name="T18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3" loext:marker-style-name="T42"><text:span text:style-name="T49">使用同一棵初始樹：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3"/>[10, 10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2"/>/ <text:s text:c="9"/>\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7"/>[20, 80] <text:s text:c="5"/>[30, 9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Step 1：</text:span><text:span text:style-name="T284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8"/>Root 右側空洞，需要補位。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1"/>[10, <text:s/>? 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1"/>/ <text:s text:c="7"/>\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6"/>[20, 80] <text:s text:c="3"/>[30, 9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Step 2：補位規則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8"/>把最後節點（[30, 90]）整體移除，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8"/>取其 max 端（90）補到 Root 的右值位置。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1"/>[10, 9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1"/>/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6"/>[20, 8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Step 3：檢查 Max Heap 性質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8"/>Root max = 90，Child max = 80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8"/>90 ≥ 80 → 符合 Max Heap → 無需交換，停止。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ext:soft-page-break/>
        <table:table-row table:style-name="表格35.1">
          <table:table-cell table:style-name="表格35.A1" office:value-type="string">
            <text:p text:style-name="P3" loext:marker-style-name="T42"><text:span text:style-name="T49">最終結果：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1"/>[10, 9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1"/>/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6"/>[20, 8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成功取出最大值 100，</text:span><text:span text:style-name="T191">結構完整</text:span><text:span text:style-name="T49">。</text:span></text:p>
          </table:table-cell>
        </table:table-row>
      </table:table>
      <text:p text:style-name="P10"/>
      <text:h text:style-name="P15" text:outline-level="2" loext:marker-style-name="T17"><text:span text:style-name="T18"><text:s text:c="2"/>三、Extract-Max 的下沉範例（需多次 Heapify）</text:span><text:span text:style-name="T17"/></text:h>
      <text:p text:style-name="P30" loext:marker-style-name="T278"><text:span text:style-name="T279">上例的 Max Heap 恰好不需要下沉。以下補充一個「確實需要多次下沉」的案例，更能體現 O(log n) 的代價：</text:span><text:span text:style-name="T278"/></text:p>
      <text:p text:style-name="P10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3" loext:marker-style-name="T42"><text:span text:style-name="T49">初始 Interval Heap（5 個節點）：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4"/>[10, 10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[20, 95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/ <text:s text:c="6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3"/>[40, 85] <text:s/>[50, 7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Step 1：取出 Root max = 100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Step 2：最後節點 [50, 70] 移除，取其 max 端 70 補到 Root。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4"/>[10, 7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[20, 95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/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3"/>[40, 8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Step 3：Root max = 70，子節點 max：左=95，右=90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較大子節點 max = 95 &gt; 70 → 違反 Max Heap → 70 與 95 交換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ext:soft-page-break/>
        <table:table-row table:style-name="表格36.1">
          <table:table-cell table:style-name="表格36.A1" office:value-type="string">
            <text:p text:style-name="P3" loext:marker-style-name="T42"><text:span text:style-name="T49"><text:s text:c="14"/>[10, 9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[20, 70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/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3"/>[40, 8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Step 4：[20, 70] 的 max = 70，子節點 max：左=85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85 &gt; 70 → 仍違反 → 70 與 85 交換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4"/>[10, 9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[20, 85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/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3"/>[40, 7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Step 5：[40, 70] 已是葉節點 → 停止。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最終結果：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4"/>[10, 9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[20, 85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/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3"/>[40, 7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全域最大值已更新為 95。</text:span><text:span text:style-name="T42"/></text:p>
          </table:table-cell>
        </table:table-row>
      </table:table>
      <text:p text:style-name="P10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3" loext:marker-style-name="T5"><text:span text:style-name="T14">公職考試必記：Find vs. Extract 時間一覽</text:span><text:span text:style-name="T5"/></text:p>
          </table:table-cell>
        </table:table-row>
        <table:table-row table:style-name="表格37.1">
          <table:table-cell table:style-name="表格37.A1" office:value-type="string">
            <text:p text:style-name="P3"/>
          </table:table-cell>
        </table:table-row>
        <table:table-row table:style-name="表格37.1">
          <table:table-cell table:style-name="表格37.A1" office:value-type="string">
            <text:p text:style-name="P3" loext:marker-style-name="T42"><text:span text:style-name="T49"><text:s text:c="2"/>操作 <text:s text:c="14"/>Interval Heap <text:s text:c="3"/>普通 Max Heap <text:s text:c="3"/>普通 Min Heap</text:span><text:span text:style-name="T42"/></text:p>
          </table:table-cell>
        </table:table-row>
        <table:table-row table:style-name="表格37.1">
          <table:table-cell table:style-name="表格37.A1" office:value-type="string">
            <text:p text:style-name="P3" loext:marker-style-name="T42"><text:span text:style-name="T49"><text:s text:c="2"/>Find-Min（找最小） O(1) <text:s/>★ <text:s text:c="9"/>O(n) <text:s text:c="12"/>O(1)</text:span><text:span text:style-name="T42"/></text:p>
          </table:table-cell>
        </table:table-row>
        <text:soft-page-break/>
        <table:table-row table:style-name="表格37.1">
          <table:table-cell table:style-name="表格37.A1" office:value-type="string">
            <text:p text:style-name="P3" loext:marker-style-name="T42"><text:span text:style-name="T49"><text:s text:c="2"/>Find-Max（找最大） O(1) <text:s/>★ <text:s text:c="9"/>O(1) <text:s text:c="12"/>O(n)</text:span><text:span text:style-name="T42"/></text:p>
          </table:table-cell>
        </table:table-row>
        <table:table-row table:style-name="表格37.1">
          <table:table-cell table:style-name="表格37.A1" office:value-type="string">
            <text:p text:style-name="P11"><text:span text:style-name="T221"><text:s text:c="2"/>Extract-Min <text:s text:c="7"/>O(log n) <text:s text:c="9"/></text:span><text:span text:style-name="T282">O(n) </text:span><text:span text:style-name="T221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11"><text:span text:style-name="T221"><text:s text:c="2"/>Extract-Max <text:s text:c="7"/>O(log n) <text:s text:c="9"/>O(log n) <text:s text:c="8"/></text:span><text:span text:style-name="T283">O(n)</text:span></text:p>
          </table:table-cell>
        </table:table-row>
        <table:table-row table:style-name="表格37.1">
          <table:table-cell table:style-name="表格37.A1" office:value-type="string">
            <text:p text:style-name="P3"/>
          </table:table-cell>
        </table:table-row>
        <table:table-row table:style-name="表格37.1">
          <table:table-cell table:style-name="表格37.A1" office:value-type="string">
            <text:p text:style-name="P3" loext:marker-style-name="T42"><text:span text:style-name="T90">Interval Heap 的兩個 Extract 都是 O(log n)</text:span><text:span text:style-name="T49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3" loext:marker-style-name="T42"><text:span text:style-name="T49">Find 快是因為答案就在 Root；</text:span><text:span text:style-name="T42"/></text:p>
          </table:table-cell>
        </table:table-row>
        <table:table-row table:style-name="表格37.1">
          <table:table-cell table:style-name="表格37.A1" office:value-type="string">
            <text:p text:style-name="P3" loext:marker-style-name="T42"><text:span text:style-name="T212">Extract 要 O(log n) </text:span><text:span text:style-name="T49">是因為</text:span><text:span text:style-name="T209">刪除後必須 Heapify Down 修復結構</text:span><text:span text:style-name="T49">。</text:span></text:p>
          </table:table-cell>
        </table:table-row>
      </table:table>
      <text:p text:style-name="P10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3" loext:marker-style-name="T42"><text:span text:style-name="T49">⚠️ <text:s/>常見混淆整理：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3"/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「Root 節點同時持有全域最小與最大值，所以 O(1) 找到。」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→ 正確。Find = 讀一個值，完全不修改樹，當然 O(1)。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3"/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「Find 都 O(1) 了，Extract 怎麼還要 O(log n)？」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→ 因為</text:span><text:span text:style-name="T158"> Extract 是「刪除 + 修復整棵樹」，不只是讀值。</text:span></text:p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<text:s text:c="2"/></text:span><text:span text:style-name="T104">刪除後最後元素補位</text:span><text:span text:style-name="T49">，再 Heapify Down 重建性質，</text:span></text:p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<text:s text:c="2"/>最壞走 log n 層 → O(log n)。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3"/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記法：Find = 看，不動樹 → O(1)。</text:span><text:span text:style-name="T191">Extract = 拿走，要整理 → O(log n)</text:span><text:span text:style-name="T49">。</text:span></text:p>
          </table:table-cell>
        </table:table-row>
      </table:table>
      <text:p text:style-name="P10"/>
      <text:p text:style-name="P10"/>
      <text:h text:style-name="P16" text:outline-level="2" loext:marker-style-name="T20"><text:span text:style-name="T20">7-5 <text:s/></text:span><text:span text:style-name="T21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285"><text:span text:style-name="T286">操作</text:span><text:span text:style-name="T285"/></text:p>
          </table:table-cell>
          <table:table-cell table:style-name="表格39.A1" office:value-type="string">
            <text:p text:style-name="Standard" loext:marker-style-name="T285"><text:span text:style-name="T285">Interval Heap</text:span><text:span text:style-name="T285"/></text:p>
          </table:table-cell>
          <table:table-cell table:style-name="表格39.A1" office:value-type="string">
            <text:p text:style-name="Standard" loext:marker-style-name="T285"><text:span text:style-name="T286">普通 </text:span><text:span text:style-name="T285">Max Heap</text:span></text:p>
          </table:table-cell>
          <table:table-cell table:style-name="表格39.A1" office:value-type="string">
            <text:p text:style-name="Standard" loext:marker-style-name="T285"><text:span text:style-name="T286">普通 </text:span><text:span text:style-name="T285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60"><text:span text:style-name="T260">Find-Min</text:span><text:span text:style-name="T261">（找最小值）</text:span></text:p>
          </table:table-cell>
          <table:table-cell table:style-name="表格39.A2" office:value-type="string">
            <text:p text:style-name="Standard" loext:marker-style-name="T260"><text:span text:style-name="T260">O(1) ★</text:span><text:span text:style-name="T260"/></text:p>
          </table:table-cell>
          <table:table-cell table:style-name="表格39.A2" office:value-type="string">
            <text:p text:style-name="Standard" loext:marker-style-name="T260"><text:span text:style-name="T260">O(n)</text:span><text:span text:style-name="T260"/></text:p>
          </table:table-cell>
          <table:table-cell table:style-name="表格39.A2" office:value-type="string">
            <text:p text:style-name="Standard" loext:marker-style-name="T260"><text:span text:style-name="T260">O(1)</text:span><text:span text:style-name="T260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60"><text:span text:style-name="T260">Find-Max</text:span><text:span text:style-name="T261">（找最大值）</text:span></text:p>
          </table:table-cell>
          <table:table-cell table:style-name="表格39.A3" office:value-type="string">
            <text:p text:style-name="Standard" loext:marker-style-name="T260"><text:span text:style-name="T260">O(1) ★</text:span><text:span text:style-name="T260"/></text:p>
          </table:table-cell>
          <table:table-cell table:style-name="表格39.A3" office:value-type="string">
            <text:p text:style-name="Standard" loext:marker-style-name="T260"><text:span text:style-name="T260">O(1)</text:span><text:span text:style-name="T260"/></text:p>
          </table:table-cell>
          <table:table-cell table:style-name="表格39.A3" office:value-type="string">
            <text:p text:style-name="Standard" loext:marker-style-name="T260"><text:span text:style-name="T260">O(n)</text:span><text:span text:style-name="T260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60"><text:span text:style-name="T260">Extract-Min</text:span><text:span text:style-name="T261">（取出最小）</text:span></text:p>
          </table:table-cell>
          <table:table-cell table:style-name="表格39.A2" office:value-type="string">
            <text:p text:style-name="P44">O(log n) ★</text:p>
          </table:table-cell>
          <table:table-cell table:style-name="表格39.A2" office:value-type="string">
            <text:p text:style-name="P47">O(n)</text:p>
          </table:table-cell>
          <table:table-cell table:style-name="表格39.A2" office:value-type="string">
            <text:p text:style-name="Standard" loext:marker-style-name="T260"><text:span text:style-name="T260">O(log n)</text:span><text:span text:style-name="T260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60"><text:span text:style-name="T260">Extract-Max</text:span><text:span text:style-name="T261">（取出最大）</text:span></text:p>
          </table:table-cell>
          <table:table-cell table:style-name="表格39.A3" office:value-type="string">
            <text:p text:style-name="P44">O(log n) ★</text:p>
          </table:table-cell>
          <table:table-cell table:style-name="表格39.A3" office:value-type="string">
            <text:p text:style-name="Standard" loext:marker-style-name="T260"><text:span text:style-name="T260">O(log n)</text:span><text:span text:style-name="T260"/></text:p>
          </table:table-cell>
          <table:table-cell table:style-name="表格39.A3" office:value-type="string">
            <text:p text:style-name="P47">O(n)</text:p>
          </table:table-cell>
        </table:table-row>
      </table:table>
      <text:p text:style-name="P6"/>
      <table:table table:name="表格40" table:style-name="表格40">
        <table:table-column table:style-name="表格40.A"/>
        <text:soft-page-break/>
        <table:table-row table:style-name="表格40.1">
          <table:table-cell table:style-name="表格40.A1" office:value-type="string">
            <text:p text:style-name="P9" loext:marker-style-name="T230"><text:span text:style-name="T230">⚠️ <text:s/></text:span><text:span text:style-name="T231">普通 </text:span><text:span text:style-name="T230">Min/Max Heap </text:span><text:span text:style-name="T231">各有盲點：</text:span></text:p>
            <text:p text:style-name="P9" loext:marker-style-name="T245"><text:span text:style-name="T66">普通 </text:span><text:span text:style-name="T67">Max Heap </text:span><text:span text:style-name="T66">找最小值 </text:span><text:span text:style-name="T246">→ </text:span><text:span text:style-name="T233">O(n)</text:span><text:span text:style-name="T232">（要掃整棵樹）</text:span></text:p>
            <text:p text:style-name="P9" loext:marker-style-name="T245"><text:span text:style-name="T76">普通 </text:span><text:span text:style-name="T77">Min Heap </text:span><text:span text:style-name="T76">找最大值 </text:span><text:span text:style-name="T246">→ </text:span><text:span text:style-name="T233">O(n)</text:span><text:span text:style-name="T232">（同理）</text:span></text:p>
            <text:p text:style-name="P43" loext:marker-style-name="T245"><text:span text:style-name="T84">Interval Heap </text:span><text:span text:style-name="T82">解決此問題，兩端操作都達到 </text:span><text:span text:style-name="T84">O(log n)</text:span><text:span text:style-name="T246">，這是其最大優勢。</text:span></text:p>
          </table:table-cell>
        </table:table-row>
      </table:table>
      <text:p text:style-name="P10"/>
      <text:h text:style-name="P16" text:outline-level="2" loext:marker-style-name="T20"><text:span text:style-name="T20">7-6 <text:s/>Insert </text:span><text:span text:style-name="T21">操作示範（插入 </text:span><text:span text:style-name="T20">5</text:span><text:span text:style-name="T21">）</text:span></text:h>
      <text:p text:style-name="P6" loext:marker-style-name="T228"><text:span text:style-name="T229">以下示範將數字 </text:span><text:span text:style-name="T228">5 </text:span><text:span text:style-name="T229">插入含 </text:span><text:span text:style-name="T228">{10, 100}, {20, 80}, {30, 90} </text:span><text:span text:style-name="T229">的 </text:span><text:span text:style-name="T228">Interval Heap</text:span><text:span text:style-name="T229">：</text:span></text:p>
      <text:p text:style-name="P39" loext:marker-style-name="T262"><text:span text:style-name="T262">初始： <text:s text:c="10"/>[10, 100]</text:span><text:span text:style-name="T262"/></text:p>
      <text:p text:style-name="P7" loext:marker-style-name="T262"><text:span text:style-name="T262"><text:s text:c="18"/>/ <text:s text:c="7"/>\</text:span><text:span text:style-name="T262"/></text:p>
      <text:p text:style-name="P7" loext:marker-style-name="T262"><text:span text:style-name="T262"><text:s text:c="13"/>[20, 80] <text:s text:c="2"/>[30, 90]</text:span><text:span text:style-name="T262"/></text:p>
      <text:p text:style-name="P7"/>
      <text:p text:style-name="P7" loext:marker-style-name="T262"><text:span text:style-name="T262">Step 1：</text:span><text:span text:style-name="T263">新葉 [5, 5] </text:span><text:span text:style-name="T262">接在 [20, 80] 左子位置</text:span></text:p>
      <text:p text:style-name="P7" loext:marker-style-name="T262"><text:span text:style-name="T262"><text:s text:c="13"/>[10, 100]</text:span><text:span text:style-name="T262"/></text:p>
      <text:p text:style-name="P7" loext:marker-style-name="T262"><text:span text:style-name="T262"><text:s text:c="14"/>/ <text:s text:c="7"/>\</text:span><text:span text:style-name="T262"/></text:p>
      <text:p text:style-name="P7" loext:marker-style-name="T262"><text:span text:style-name="T262"><text:s text:c="9"/>[20, 80] <text:s text:c="2"/>[30, 90]</text:span><text:span text:style-name="T262"/></text:p>
      <text:p text:style-name="P7" loext:marker-style-name="T262"><text:span text:style-name="T262"><text:s text:c="14"/>/</text:span><text:span text:style-name="T262"/></text:p>
      <text:p text:style-name="P7" loext:marker-style-name="T262"><text:span text:style-name="T262"><text:s text:c="11"/>[5, 5] <text:s text:c="2"/>← </text:span><text:span text:style-name="T74">5 &lt; parent.min(20)</text:span><text:span text:style-name="T262">，</text:span><text:span text:style-name="T196">min 端需上浮</text:span></text:p>
      <text:p text:style-name="P7"/>
      <text:p text:style-name="P7" loext:marker-style-name="T262"><text:span text:style-name="T262">Step 2：</text:span><text:span text:style-name="T147">交換 min 端 → [20,80]→[5,80]</text:span><text:span text:style-name="T262">，</text:span><text:span text:style-name="T196">葉→[20,20]</text:span></text:p>
      <text:p text:style-name="P7" loext:marker-style-name="T262"><text:span text:style-name="T262"><text:s text:c="13"/>[10, 100]</text:span><text:span text:style-name="T262"/></text:p>
      <text:p text:style-name="P7" loext:marker-style-name="T262"><text:span text:style-name="T262"><text:s text:c="14"/>/ <text:s text:c="7"/>\</text:span><text:span text:style-name="T262"/></text:p>
      <text:p text:style-name="P7" loext:marker-style-name="T262"><text:span text:style-name="T262"><text:s text:c="10"/>[5, 80] <text:s text:c="2"/>[30, 90] <text:s text:c="2"/>← </text:span><text:span text:style-name="T74">5 &lt; Root.min(10)</text:span><text:span text:style-name="T262">，</text:span><text:span text:style-name="T196">繼續上浮</text:span></text:p>
      <text:p text:style-name="P7" loext:marker-style-name="T262"><text:span text:style-name="T262"><text:s text:c="14"/>/</text:span><text:span text:style-name="T262"/></text:p>
      <text:p text:style-name="P7" loext:marker-style-name="T262"><text:span text:style-name="T262"><text:s text:c="10"/>[20, 20]</text:span><text:span text:style-name="T262"/></text:p>
      <text:p text:style-name="P7"/>
      <text:p text:style-name="P7" loext:marker-style-name="T262"><text:span text:style-name="T262">Step 3：</text:span><text:span text:style-name="T147">交換 min 端 → Root[10,100]→[5,100]</text:span><text:span text:style-name="T262">，</text:span><text:span text:style-name="T196">[5,80]→[10,80]</text:span></text:p>
      <text:p text:style-name="P7"/>
      <text:p text:style-name="P7" loext:marker-style-name="T262"><text:span text:style-name="T262">最終： <text:s text:c="10"/>[5, 100] <text:s text:c="2"/>← </text:span><text:span text:style-name="T156">全域最小值已更新</text:span></text:p>
      <text:p text:style-name="P7" loext:marker-style-name="T262"><text:span text:style-name="T262"><text:s text:c="18"/>/ <text:s text:c="7"/>\</text:span><text:span text:style-name="T262"/></text:p>
      <text:p text:style-name="P7" loext:marker-style-name="T262"><text:span text:style-name="T262"><text:s text:c="13"/>[10, 80] <text:s text:c="2"/>[30, 90]</text:span><text:span text:style-name="T262"/></text:p>
      <text:p text:style-name="P7" loext:marker-style-name="T262"><text:span text:style-name="T262"><text:s text:c="18"/>/</text:span><text:span text:style-name="T262"/></text:p>
      <text:p text:style-name="P41" loext:marker-style-name="T262"><text:span text:style-name="T262"><text:s text:c="13"/>[20, 20]</text:span><text:span text:style-name="T262"/></text:p>
      <text:p text:style-name="P9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9" loext:marker-style-name="T230"><text:span text:style-name="T230">Insert </text:span><text:span text:style-name="T231">規則：</text:span></text:p>
            <text:p text:style-name="P9" loext:marker-style-name="T245"><text:span text:style-name="T246">新值 </text:span><text:span text:style-name="T245">&lt; </text:span><text:span text:style-name="T246">父節點左值（</text:span><text:span text:style-name="T245">min</text:span><text:span text:style-name="T246">）→ 交換左值，繼續往上（</text:span><text:span text:style-name="T245">min </text:span><text:span text:style-name="T246">端上浮）</text:span></text:p>
            <text:p text:style-name="P9" loext:marker-style-name="T245"><text:span text:style-name="T246">新值 </text:span><text:span text:style-name="T245">&gt; </text:span><text:span text:style-name="T246">父節點右值（</text:span><text:span text:style-name="T245">max</text:span><text:span text:style-name="T246">）→ 交換右值，繼續往上（</text:span><text:span text:style-name="T245">max </text:span><text:span text:style-name="T246">端上浮）</text:span></text:p>
            <text:p text:style-name="P12"><text:span text:style-name="T223">新值介於父節點 </text:span><text:span text:style-name="T224">[min, max] </text:span><text:span text:style-name="T223">之間 → 合法，停止</text:span></text:p>
          </table:table-cell>
        </table:table-row>
      </table:table>
      <text:h text:style-name="P2" text:outline-level="1"><text:span text:style-name="T227">八、合併兩個 </text:span><text:span text:style-name="T226">Heap</text:span><text:span text:style-name="T227">（</text:span><text:span text:style-name="T226">Merge Heap</text:span><text:span text:style-name="T227">）【</text:span><text:span text:style-name="T226">111</text:span><text:span text:style-name="T227">地</text:span><text:span text:style-name="T226">Q4</text:span><text:span text:style-name="T227">】</text:span></text:h>
      <text:p text:style-name="P6" loext:marker-style-name="T228"><text:span text:style-name="T229">這一章看起來很多，其實從頭到尾只在回答 </text:span></text:p>
      <table:table table:name="表格M1" table:style-name="表格M1">
        <table:table-column table:style-name="表格M1.A"/>
        <table:table-row table:style-name="表格M1.1">
          <table:table-cell table:style-name="表格M1.A1" office:value-type="string">
            <text:p text:style-name="P43" loext:marker-style-name="T230"><text:span text:style-name="T231">一個問題：如果有兩個 Heap，要怎麼「快速」合併成一個？</text:span></text:p>
          </table:table-cell>
        </table:table-row>
      </table:table>
      <text:p text:style-name="P6" loext:marker-style-name="T228"><text:soft-page-break/><text:span text:style-name="T229">把這句話記在心裡，下面每一段都是為了回答它。</text:span></text:p>
      <text:p text:style-name="P10"/>
      <text:h text:style-name="P16" text:outline-level="2" loext:marker-style-name="T20"><text:span text:style-name="T20">8-1 <text:s/></text:span><text:span text:style-name="T21">先看普通 Binary Heap 怎麼合併（為什麼會慢）</text:span></text:h>
      <text:p text:style-name="P6" loext:marker-style-name="T228"><text:span text:style-name="T229">假設你有兩個 </text:span><text:span text:style-name="T228">Max Heap A</text:span><text:span text:style-name="T229"> 和 </text:span><text:span text:style-name="T228">B</text:span><text:span text:style-name="T229">，想把它們併成一個新的 Max Heap：</text:span></text:p>
      <text:p text:style-name="P39" loext:marker-style-name="T262"><text:span text:style-name="T262"><text:s text:c="3"/>Heap A： <text:s text:c="9"/>Heap B：</text:span><text:span text:style-name="T262"/></text:p>
      <text:p text:style-name="P7" loext:marker-style-name="T262"><text:span text:style-name="T262"><text:s text:c="6"/>90 <text:s text:c="15"/>95</text:span><text:span text:style-name="T262"/></text:p>
      <text:p text:style-name="P7" loext:marker-style-name="T262"><text:span text:style-name="T262"><text:s text:c="5"/>/ <text:s/>\ <text:s text:c="13"/>/ <text:s/>\</text:span><text:span text:style-name="T262"/></text:p>
      <text:p text:style-name="P41" loext:marker-style-name="T262"><text:span text:style-name="T262"><text:s text:c="4"/>70 <text:s text:c="2"/>80 <text:s text:c="10"/>60 <text:s text:c="2"/>50</text:span><text:span text:style-name="T262"/></text:p>
      <text:p text:style-name="P6" loext:marker-style-name="T228"><text:span text:style-name="T230">你的第一個直覺，大概是這樣做：</text:span></text:p>
      <text:p text:style-name="P39" loext:marker-style-name="T262"><text:span text:style-name="T262"><text:s text:c="2"/>Step1 <text:s/>把兩棵全部「倒出來」</text:span><text:span text:style-name="T262"/></text:p>
      <text:p text:style-name="P7" loext:marker-style-name="T262"><text:span text:style-name="T262"><text:s text:c="9"/>90 70 80 95 60 50</text:span><text:span text:style-name="T262"/></text:p>
      <text:p text:style-name="P8"/>
      <text:p text:style-name="P7" loext:marker-style-name="T262"><text:span text:style-name="T262"><text:s text:c="2"/>Step2 <text:s/>重新 Build Heap（Bottom-Up）</text:span><text:span text:style-name="T262"/></text:p>
      <text:p text:style-name="P7" loext:marker-style-name="T262"><text:span text:style-name="T262"><text:s text:c="16"/>95</text:span><text:span text:style-name="T262"/></text:p>
      <text:p text:style-name="P7" loext:marker-style-name="T262"><text:span text:style-name="T262"><text:s text:c="15"/>/ <text:s/>\</text:span><text:span text:style-name="T262"/></text:p>
      <text:p text:style-name="P7" loext:marker-style-name="T262"><text:span text:style-name="T262"><text:s text:c="13"/>90 <text:s text:c="3"/>80</text:span><text:span text:style-name="T262"/></text:p>
      <text:p text:style-name="P7" loext:marker-style-name="T262"><text:span text:style-name="T262"><text:s text:c="12"/>/ <text:s/>\ <text:s text:c="2"/>/</text:span><text:span text:style-name="T262"/></text:p>
      <text:p text:style-name="P41" loext:marker-style-name="T262"><text:span text:style-name="T262"><text:s text:c="11"/>70 <text:s/>60 50</text:span><text:span text:style-name="T262"/></text:p>
      <text:p text:style-name="P6" loext:marker-style-name="T228"><text:span text:style-name="T229">這就是普通 </text:span><text:span text:style-name="T84">Binary Heap</text:span><text:span text:style-name="T229"> 的作法：全部元素重新整理一次。時間是 </text:span><text:span text:style-name="T204">O(n+m)</text:span><text:span text:style-name="T229">（n、m 是兩個 Heap 的大小）。</text:span></text:p>
      <table:table table:name="表格M2" table:style-name="表格M2">
        <table:table-column table:style-name="表格M2.A"/>
        <table:table-row table:style-name="表格M2.1">
          <table:table-cell table:style-name="表格M2.A1" office:value-type="string">
            <text:p text:style-name="P9" loext:marker-style-name="T230"><text:span text:style-name="T230">❓ </text:span><text:span text:style-name="T233">單次來看 O(n+m) 其實還好，問題出在哪？</text:span></text:p>
            <text:p text:style-name="P9" loext:marker-style-name="T245"><text:span text:style-name="T246">麻煩的是有些系統「一天要合併幾十萬次」，例如：</text:span></text:p>
            <text:p text:style-name="P9" loext:marker-style-name="T245"><text:span text:style-name="T246">• 事件驅動模擬（Event-driven Simulation）</text:span></text:p>
            <text:p text:style-name="P9" loext:marker-style-name="T245"><text:span text:style-name="T246">• 作業系統排程器（Scheduler）</text:span></text:p>
            <text:p text:style-name="P43" loext:marker-style-name="T245"><text:span text:style-name="T246">• 分散式工作佇列（Distributed Job Queue）</text:span></text:p>
          </table:table-cell>
        </table:table-row>
      </table:table>
      <text:p text:style-name="P6" loext:marker-style-name="T228"><text:span text:style-name="T229">想像一直 Merge：A+B→C，C+D→E，E+F→… 一路併下去。每次都 </text:span><text:span text:style-name="T204">O(n+m)</text:span><text:span text:style-name="T229">，就太慢了。於是有人問：能不能「不要每次都重建」？</text:span></text:p>
      <text:p text:style-name="P10"/>
      <text:h text:style-name="P16" text:outline-level="2" loext:marker-style-name="T20"><text:span text:style-name="T20">8-2 <text:s/></text:span><text:span text:style-name="T21">Leftist Heap 的核心想法：Merge 只走右邊</text:span></text:h>
      <text:p text:style-name="P6" loext:marker-style-name="T228"><text:span text:style-name="T229">為了讓 Merge 變快，有人發明了 </text:span><text:span text:style-name="T84">Leftist Heap</text:span><text:span text:style-name="T229">（</text:span><text:span text:style-name="T236">左偏堆</text:span><text:span text:style-name="T229">）。先講清楚一件最容易誤會的事：</text:span></text:p>
      <table:table table:name="表格M3" table:style-name="表格M3">
        <table:table-column table:style-name="表格M3.A"/>
        <table:table-row table:style-name="表格M3.1">
          <table:table-cell table:style-name="表格M3.A1" office:value-type="string">
            <text:p text:style-name="P9" loext:marker-style-name="T230"><text:span text:style-name="T188">Leftist Heap 唯一的目的，就是「讓 Merge 很快」</text:span><text:span text:style-name="T231">。</text:span></text:p>
            <text:p text:style-name="P43" loext:marker-style-name="T245"><text:span text:style-name="T246">不是 Insert 更快、不是 Delete 更快——就只是 </text:span><text:span text:style-name="T232">Merge 很快</text:span><text:span text:style-name="T246">。</text:span></text:p>
          </table:table-cell>
        </table:table-row>
      </table:table>
      <text:p text:style-name="P6" loext:marker-style-name="T228"><text:span text:style-name="T230">那它怎麼做到的？整章最重要的一句話：</text:span></text:p>
      <table:table table:name="表格M4" table:style-name="表格M4">
        <table:table-column table:style-name="表格M4.A"/>
        <table:table-row table:style-name="表格M4.1">
          <table:table-cell table:style-name="表格M4.A1" office:value-type="string">
            <text:p text:style-name="P43" loext:marker-style-name="T230"><text:span text:style-name="T177">Merge</text:span><text:span text:style-name="T178"> 只走右邊：Root → 右 → 右 → 右</text:span></text:p>
          </table:table-cell>
        </table:table-row>
      </table:table>
      <text:p text:style-name="P6" loext:marker-style-name="T228"><text:span text:style-name="T229">不是整棵樹、不是 DFS、也不是 BFS。Merge 只會沿著「最右邊那條路」往下走。例如：</text:span></text:p>
      <text:p text:style-name="P39" loext:marker-style-name="T262"><text:span text:style-name="T262"><text:s text:c="8"/>3</text:span><text:span text:style-name="T262"/></text:p>
      <text:p text:style-name="P7" loext:marker-style-name="T262"><text:span text:style-name="T262"><text:s text:c="7"/>/ \</text:span><text:span text:style-name="T262"/></text:p>
      <text:p text:style-name="P7" loext:marker-style-name="T262"><text:soft-page-break/><text:span text:style-name="T262"><text:s text:c="6"/>5 <text:s text:c="2"/>8 <text:s text:c="7"/></text:span><text:span text:style-name="T181">Merge 只會碰到：</text:span></text:p>
      <text:p text:style-name="P7" loext:marker-style-name="T262"><text:span text:style-name="T262"><text:s text:c="11"/>\ <text:s text:c="6"/></text:span><text:span text:style-name="T181">3 → 8 → 9 → 12</text:span></text:p>
      <text:p text:style-name="P7" loext:marker-style-name="T262"><text:span text:style-name="T262"><text:s text:c="12"/>9</text:span><text:span text:style-name="T262"/></text:p>
      <text:p text:style-name="P7" loext:marker-style-name="T262"><text:span text:style-name="T262"><text:s text:c="13"/>\ <text:s text:c="4"/></text:span><text:span text:style-name="T112">左邊的 5 完全不動！</text:span></text:p>
      <text:p text:style-name="P41" loext:marker-style-name="T262"><text:span text:style-name="T262"><text:s text:c="13"/>12</text:span><text:span text:style-name="T262"/></text:p>
      <text:p text:style-name="P6" loext:marker-style-name="T228"><text:span text:style-name="T229">既然只走右邊，那</text:span><text:span text:style-name="T83">「右邊有多長」就決定了 Merge 有多快</text:span><text:span text:style-name="T229">。可是</text:span><text:span text:style-name="T127">如果右邊很長呢？</text:span></text:p>
      <text:p text:style-name="P39" loext:marker-style-name="T262"><text:span text:style-name="T262"><text:s text:c="3"/>3</text:span><text:span text:style-name="T262"/></text:p>
      <text:p text:style-name="P7" loext:marker-style-name="T262"><text:span text:style-name="T262"><text:s text:c="4"/>\</text:span><text:span text:style-name="T262"/></text:p>
      <text:p text:style-name="P7" loext:marker-style-name="T262"><text:span text:style-name="T262"><text:s text:c="5"/>4</text:span><text:span text:style-name="T262"/></text:p>
      <text:p text:style-name="P7" loext:marker-style-name="T262"><text:span text:style-name="T262"><text:s text:c="6"/>\</text:span><text:span text:style-name="T262"/></text:p>
      <text:p text:style-name="P7" loext:marker-style-name="T262"><text:span text:style-name="T262"><text:s text:c="7"/>5 <text:s text:c="5"/>右側路徑 = 5 步</text:span><text:span text:style-name="T262"/></text:p>
      <text:p text:style-name="P7" loext:marker-style-name="T262"><text:span text:style-name="T262"><text:s text:c="8"/>\ <text:s text:c="4"/>→ Merge 退化成 O(n) <text:s/>✗</text:span><text:span text:style-name="T262"/></text:p>
      <text:p text:style-name="P7" loext:marker-style-name="T262"><text:span text:style-name="T262"><text:s text:c="9"/>6</text:span><text:span text:style-name="T262"/></text:p>
      <text:p text:style-name="P7" loext:marker-style-name="T262"><text:span text:style-name="T262"><text:s text:c="10"/>\</text:span><text:span text:style-name="T262"/></text:p>
      <text:p text:style-name="P41" loext:marker-style-name="T262"><text:span text:style-name="T262"><text:s text:c="11"/>7</text:span><text:span text:style-name="T262"/></text:p>
      <text:p text:style-name="P6" loext:marker-style-name="T228"><text:span text:style-name="T229">所以 </text:span><text:span text:style-name="T203">Leftist Heap 的招數就是一句話：</text:span></text:p>
      <table:table table:name="表格M5" table:style-name="表格M5">
        <table:table-column table:style-name="表格M5.A"/>
        <table:table-row table:style-name="表格M5.1">
          <table:table-cell table:style-name="表格M5.A1" office:value-type="string">
            <text:p text:style-name="P45"><text:span text:style-name="T223">故意讓「右邊」永遠很短。</text:span></text:p>
          </table:table-cell>
        </table:table-row>
      </table:table>
      <text:p text:style-name="P46"/>
      <text:h text:style-name="P16" text:outline-level="2" loext:marker-style-name="T20"><text:span text:style-name="T20">8-3 <text:s/></text:span><text:span text:style-name="T21">為什麼叫</text:span><text:span text:style-name="T23"> Leftist（左偏）</text:span><text:span text:style-name="T21">？</text:span></text:h>
      <text:p text:style-name="P6" loext:marker-style-name="T228"><text:span text:style-name="T229">因為</text:span><text:span text:style-name="T188">它「故意」長得左長右短：左邊可以很長，右邊一定很短</text:span><text:span text:style-name="T229">。</text:span></text:p>
      <text:p text:style-name="P39" loext:marker-style-name="T262"><text:span text:style-name="T262"><text:s text:c="3"/>左偏（Leftist，正確） <text:s text:c="7"/>右傾（不好）</text:span><text:span text:style-name="T262"/></text:p>
      <text:p text:style-name="P7" loext:marker-style-name="T262"><text:span text:style-name="T262"><text:s text:c="10"/>3 <text:s text:c="23"/>3</text:span><text:span text:style-name="T262"/></text:p>
      <text:p text:style-name="P7" loext:marker-style-name="T262"><text:span text:style-name="T262"><text:s text:c="9"/>/ <text:s text:c="25"/>\</text:span><text:span text:style-name="T262"/></text:p>
      <text:p text:style-name="P7" loext:marker-style-name="T262"><text:span text:style-name="T262"><text:s text:c="8"/>5 <text:s text:c="27"/>5</text:span><text:span text:style-name="T262"/></text:p>
      <text:p text:style-name="P7" loext:marker-style-name="T262"><text:span text:style-name="T262"><text:s text:c="7"/>/ <text:s text:c="29"/>\</text:span><text:span text:style-name="T262"/></text:p>
      <text:p text:style-name="P7" loext:marker-style-name="T262"><text:span text:style-name="T262"><text:s text:c="6"/>7 <text:s text:c="31"/>7</text:span><text:span text:style-name="T262"/></text:p>
      <text:p text:style-name="P7" loext:marker-style-name="T262"><text:span text:style-name="T262"><text:s text:c="5"/>/ <text:s text:c="33"/>\</text:span><text:span text:style-name="T262"/></text:p>
      <text:p text:style-name="P7" loext:marker-style-name="T262"><text:span text:style-name="T262"><text:s text:c="4"/>9 <text:s text:c="35"/>9</text:span><text:span text:style-name="T262"/></text:p>
      <text:p text:style-name="P8"/>
      <text:p text:style-name="P41" loext:marker-style-name="T262"><text:span text:style-name="T262"><text:s text:c="3"/></text:span><text:span text:style-name="T113">右邊只有 0 步，Merge 超快 ✓</text:span><text:span text:style-name="T262"> <text:s text:c="4"/>右邊 4 步，Merge 很慢 ✗</text:span></text:p>
      <text:p text:style-name="P6" loext:marker-style-name="T228"><text:span text:style-name="T229">「左偏」這個名字的意思就是：</text:span><text:span text:style-name="T86">樹被故意往左邊壓，把長度都丟到左邊去</text:span><text:span text:style-name="T229">，</text:span><text:span text:style-name="T231">好讓右邊保持最短</text:span><text:span text:style-name="T229">。</text:span></text:p>
      <text:p text:style-name="P10"/>
      <text:h text:style-name="P16" text:outline-level="2" loext:marker-style-name="T20"><text:span text:style-name="T20">8-4 <text:s/></text:span><text:span text:style-name="T21">NPL 是什麼鬼？（先懂它要幹嘛，再看公式）</text:span></text:h>
      <text:p text:style-name="P6" loext:marker-style-name="T228"><text:span text:style-name="T229">很多人就是死在 NPL 這裡。其實它沒那麼可怕——</text:span></text:p>
      <table:table table:name="表格M6" table:style-name="表格M6">
        <table:table-column table:style-name="表格M6.A"/>
        <table:table-row table:style-name="表格M6.1">
          <table:table-cell table:style-name="表格M6.A1" office:value-type="string">
            <text:p text:style-name="P43" loext:marker-style-name="T230"><text:span text:style-name="T176">NPL 只是一個數字，用來「量右邊會不會太長」</text:span><text:span text:style-name="T231">。</text:span></text:p>
          </table:table-cell>
        </table:table-row>
      </table:table>
      <text:p text:style-name="P6" loext:marker-style-name="T228"><text:span text:style-name="T229">先用最白話的方式感覺一下它在數什麼：</text:span></text:p>
      <text:p text:style-name="P39" loext:marker-style-name="T262"><text:span text:style-name="T262"><text:s text:c="5"/>A <text:s text:c="11"/>A <text:s text:c="13"/>A</text:span><text:span text:style-name="T262"/></text:p>
      <text:p text:style-name="P7" loext:marker-style-name="T262"><text:span text:style-name="T262"><text:s text:c="17"/>/ <text:s text:c="13"/>/ \</text:span><text:span text:style-name="T262"/></text:p>
      <text:p text:style-name="P7" loext:marker-style-name="T262"><text:span text:style-name="T262"><text:s text:c="16"/>B <text:s text:c="13"/>B <text:s text:c="2"/>C</text:span><text:span text:style-name="T262"/></text:p>
      <text:p text:style-name="P8"/>
      <text:p text:style-name="P7" loext:marker-style-name="T262"><text:span text:style-name="T262"><text:s text:c="2"/>沒有小孩 <text:s text:c="5"/>只有左邊 <text:s text:c="7"/>左右都有</text:span><text:span text:style-name="T262"/></text:p>
      <text:p text:style-name="P41" loext:marker-style-name="T262"><text:span text:style-name="T262"><text:s text:c="2"/>NPL = 0 <text:s text:c="5"/>NPL = 0 <text:s text:c="7"/>NPL = 1</text:span><text:span text:style-name="T262"/></text:p>
      <text:p text:style-name="P6" loext:marker-style-name="T228"><text:span text:style-name="T229">看出規律了嗎？</text:span><text:span text:style-name="T163">只要有一邊是空的，NPL 就是 0</text:span><text:span text:style-name="T229">。要兩邊都長得夠深，NPL 才會變大。</text:span><text:soft-page-break/><text:span text:style-name="T229">它量的就是「離最近的空位有幾步」。</text:span></text:p>
      <text:p text:style-name="P6" loext:marker-style-name="T228"><text:span text:style-name="T230">怎麼算 NPL？</text:span><text:span text:style-name="T229">其實不用背公式，只要做一件事——「數步數」：</text:span></text:p>
      <table:table table:name="表格N1" table:style-name="表格M5">
        <table:table-column table:style-name="表格M5.A"/>
        <table:table-row table:style-name="表格M5.1">
          <table:table-cell table:style-name="表格M5.A1" office:value-type="string">
            <text:p text:style-name="P9" loext:marker-style-name="T230"><text:span text:style-name="T230">站在某個點上往下看，最少走幾步會碰到一個「還缺小孩的點」——那個步數就是 NPL。</text:span></text:p>
            <text:p text:style-name="P9" loext:marker-style-name="T245"><text:span text:style-name="T246">（「缺小孩」＝葉子，或只有一個小孩的點。）</text:span></text:p>
            <text:p text:style-name="P9" loext:marker-style-name="T245"><text:span text:style-name="T246">• 這個點自己就缺小孩 → </text:span><text:span text:style-name="T233">0 步，NPL = 0</text:span></text:p>
            <text:p text:style-name="P43" loext:marker-style-name="T245"><text:span text:style-name="T246">• 兩個小孩都在 → 還得再往下走 → NPL 才會 ≥ 1（永遠取「比較近」的那一邊）</text:span></text:p>
          </table:table-cell>
        </table:table-row>
      </table:table>
      <text:p text:style-name="P6" loext:marker-style-name="T228"><text:span text:style-name="T229">套到剛才那棵樹上，看圖數一遍就懂了：</text:span></text:p>
      <text:p text:style-name="P39" loext:marker-style-name="T262"><text:span text:style-name="T262"><text:s text:c="10"/>3<text:s text:c="8"/>←<text:s/>想算它的<text:s/>NPL</text:span><text:span text:style-name="T262"/></text:p>
      <text:p text:style-name="P7" loext:marker-style-name="T262"><text:span text:style-name="T262"><text:s text:c="9"/>/<text:s/>\</text:span><text:span text:style-name="T262"/></text:p>
      <text:p text:style-name="P7" loext:marker-style-name="T262"><text:span text:style-name="T262"><text:s text:c="8"/>5<text:s text:c="3"/>8</text:span><text:span text:style-name="T262"/></text:p>
      <text:p text:style-name="P7" loext:marker-style-name="T262"><text:span text:style-name="T262"><text:s text:c="7"/>/<text:s/>\</text:span><text:span text:style-name="T262"/></text:p>
      <text:p text:style-name="P7" loext:marker-style-name="T262"><text:span text:style-name="T262"><text:s text:c="6"/>9<text:s text:c="3"/>7</text:span><text:span text:style-name="T262"/></text:p>
      <text:p text:style-name="P8"><text:span text:style-name="T262"/></text:p>
      <text:p text:style-name="P7" loext:marker-style-name="T262"><text:span text:style-name="T262"><text:s text:c="2"/>9、7、8：都是葉子，自己就缺小孩<text:s text:c="2"/>→<text:s/>0<text:s/>步<text:s/>→<text:s/>NPL<text:s/>=<text:s/>0</text:span><text:span text:style-name="T262"/></text:p>
      <text:p text:style-name="P7" loext:marker-style-name="T262"><text:span text:style-name="T262"><text:s text:c="2"/>5<text:s text:c="4"/>：往下<text:s/>1<text:s/>步就碰到葉子<text:s/>9<text:s text:c="5"/>→<text:s/>NPL<text:s/>=<text:s/>1</text:span><text:span text:style-name="T262"/></text:p>
      <text:p text:style-name="P41" loext:marker-style-name="T262"><text:span text:style-name="T262"><text:s text:c="2"/>3<text:s text:c="4"/>：往右<text:s/>1<text:s/>步就碰到葉子<text:s/>8<text:s text:c="5"/>→<text:s/>NPL<text:s/>=<text:s/>1（取最近的一邊）</text:span><text:span text:style-name="T262"/></text:p>
      <text:p text:style-name="P6" loext:marker-style-name="T228"><text:span text:style-name="T229">（看到課本把它寫成公式 NPL = 1 + min(左, 右) 也別怕，意思就是上面這個「數步數」，看懂圖就夠了。）</text:span></text:p>
      <text:p text:style-name="P6" loext:marker-style-name="T228"><text:span text:style-name="T230">左偏性質（Leftist Property）：</text:span><text:span text:style-name="T229">每個節點都必須符合一條規定——</text:span></text:p>
      <table:table table:name="表格M8" table:style-name="表格M8">
        <table:table-column table:style-name="表格M8.A"/>
        <table:table-row table:style-name="表格M8.1">
          <table:table-cell table:style-name="表格M8.A1" office:value-type="string">
            <text:p text:style-name="P9" loext:marker-style-name="T230"><text:span text:style-name="T177">對每個節點：NPL(左子樹) ≥ NPL(右子樹)</text:span></text:p>
            <text:p text:style-name="P9" loext:marker-style-name="T245"><text:span text:style-name="T246">白話：左邊一定比右邊深、或一樣深 → 右側那條路一定是最短的。</text:span></text:p>
            <text:p text:style-name="P43" loext:marker-style-name="T245"><text:span text:style-name="T246">數學上可保證：右側路徑長度 ≤ log(n+1)，所以 Merge 沿右路徑走 → </text:span><text:span text:style-name="T232">O(log n)</text:span><text:span text:style-name="T246">。</text:span></text:p>
          </table:table-cell>
        </table:table-row>
      </table:table>
      <text:p text:style-name="P10"/>
      <text:h text:style-name="P16" text:outline-level="2" loext:marker-style-name="T20"><text:span text:style-name="T20">8-5 <text:s/></text:span><text:span text:style-name="T21">Merge 真正流程：其實只有四步</text:span></text:h>
      <text:p text:style-name="P6" loext:marker-style-name="T228"><text:span text:style-name="T229">不管樹多大，Merge 永遠只重複這四步（以 </text:span><text:span text:style-name="T228">Min Leftist Heap</text:span><text:span text:style-name="T229"> 為例）：</text:span></text:p>
      <text:p text:style-name="P39" loext:marker-style-name="T262"><text:span text:style-name="T262"><text:s text:c="2"/>Step1 <text:s/>比較兩個 Root</text:span><text:span text:style-name="T262"/></text:p>
      <text:p text:style-name="P7" loext:marker-style-name="T262"><text:span text:style-name="T262"><text:s text:c="9"/>→ 小的當新 Root（Min Heap）</text:span><text:span text:style-name="T262"/></text:p>
      <text:p text:style-name="P7" loext:marker-style-name="T262"><text:span text:style-name="T262"><text:s text:c="9"/>→ 大的那棵整棵丟去後面排隊（叫它 b）</text:span><text:span text:style-name="T262"/></text:p>
      <text:p text:style-name="P8"/>
      <text:p text:style-name="P7" loext:marker-style-name="T262"><text:span text:style-name="T262"><text:s text:c="2"/>Step2 <text:s/>把 b 拿去跟「新 Root 的右子樹」Merge</text:span><text:span text:style-name="T262"/></text:p>
      <text:p text:style-name="P7" loext:marker-style-name="T262"><text:span text:style-name="T262"><text:s text:c="9"/>→ Merge(newRoot.right, b) <text:s text:c="2"/>← 永遠是右子樹！</text:span><text:span text:style-name="T262"/></text:p>
      <text:p text:style-name="P8"/>
      <text:p text:style-name="P7" loext:marker-style-name="T262"><text:span text:style-name="T262"><text:s text:c="2"/>Step3 <text:s/>Merge 完，看右邊是不是變太長了？</text:span><text:span text:style-name="T262"/></text:p>
      <text:p text:style-name="P7" loext:marker-style-name="T262"><text:span text:style-name="T262"><text:s text:c="9"/>→ 若 NPL(右) &gt; NPL(左) 就「交換左右」，恢復左偏</text:span><text:span text:style-name="T262"/></text:p>
      <text:p text:style-name="P8"/>
      <text:p text:style-name="P41" loext:marker-style-name="T262"><text:span text:style-name="T262"><text:s text:c="2"/>Step4 <text:s/>更新這個節點的 NPL</text:span><text:span text:style-name="T262"/></text:p>
      <table:table table:name="表格M9" table:style-name="表格M9">
        <table:table-column table:style-name="表格M9.A"/>
        <table:table-row table:style-name="表格M9.1">
          <table:table-cell table:style-name="表格M9.A1" office:value-type="string">
            <text:p text:style-name="P9" loext:marker-style-name="T230"><text:span text:style-name="T231">口訣：比較 Root → 走右邊 → 必要時交換左右 → 更新 NPL</text:span></text:p>
            <text:p text:style-name="P43" loext:marker-style-name="T245"><text:span text:style-name="T246">整個演算法就是一直重複這四個動作，沿著右邊往下、再一路回來。</text:span></text:p>
          </table:table-cell>
        </table:table-row>
      </table:table>
      <text:p text:style-name="P10"/>
      <text:h text:style-name="P16" text:outline-level="2" loext:marker-style-name="T20"><text:span text:style-name="T20">8-6 <text:s/></text:span><text:span text:style-name="T21">完整 Merge 範例（一步一步畫圖）</text:span></text:h>
      <text:p text:style-name="P6" loext:marker-style-name="T228"><text:span text:style-name="T229">把上面四步套到實際的樹上。要合併這兩棵 </text:span><text:span text:style-name="T228">Min Leftist Heap</text:span><text:span text:style-name="T229">：</text:span></text:p>
      <text:p text:style-name="P39" loext:marker-style-name="T262"><text:span text:style-name="T262"><text:s text:c="3"/>Heap A（NPL=1） <text:s text:c="5"/>Heap B（NPL=1）</text:span><text:span text:style-name="T262"/></text:p>
      <text:p text:style-name="P7" loext:marker-style-name="T262"><text:span text:style-name="T262"><text:s text:c="8"/>3 <text:s text:c="18"/>6</text:span><text:span text:style-name="T262"/></text:p>
      <text:p text:style-name="P7" loext:marker-style-name="T262"><text:soft-page-break/><text:span text:style-name="T262"><text:s text:c="7"/>/ \ <text:s text:c="16"/>/ \</text:span><text:span text:style-name="T262"/></text:p>
      <text:p text:style-name="P41" loext:marker-style-name="T262"><text:span text:style-name="T262"><text:s text:c="6"/>5 <text:s text:c="2"/>8 <text:s text:c="13"/>12 <text:s text:c="2"/>7</text:span><text:span text:style-name="T262"/></text:p>
      <text:p text:style-name="P6" loext:marker-style-name="T228"><text:span text:style-name="T231">① 比較 3 和 6：</text:span><text:span text:style-name="T229">3 &lt; 6 → 3 當新 Root，接著要 Merge(3 的右子樹 = 8, B = 6)。</text:span></text:p>
      <text:p text:style-name="P6" loext:marker-style-name="T228"><text:span text:style-name="T231">② 比較 8 和 6：</text:span><text:span text:style-name="T229">6 &lt; 8 → 6 當新 Root，接著要 Merge(6 的右子樹 = 7, 8)。</text:span></text:p>
      <text:p text:style-name="P6" loext:marker-style-name="T228"><text:span text:style-name="T231">③ 比較 7 和 8：</text:span><text:span text:style-name="T229">7 &lt; 8 → 7 當新 Root，Merge(7 的右子樹 = 空, 8) 直接得到 8。</text:span></text:p>
      <text:p text:style-name="P39" loext:marker-style-name="T262"><text:span text:style-name="T262"><text:s text:c="2"/>此時 7.right = 8，但 7.left 是空的：</text:span><text:span text:style-name="T262"/></text:p>
      <text:p text:style-name="P7" loext:marker-style-name="T262"><text:span text:style-name="T262"><text:s text:c="8"/>7 <text:s text:c="16"/>NPL(左=空)= -1</text:span><text:span text:style-name="T262"/></text:p>
      <text:p text:style-name="P7" loext:marker-style-name="T262"><text:span text:style-name="T262"><text:s text:c="9"/>\ <text:s text:c="15"/>NPL(右=8) = <text:s/>0</text:span><text:span text:style-name="T262"/></text:p>
      <text:p text:style-name="P7" loext:marker-style-name="T262"><text:span text:style-name="T262"><text:s text:c="10"/>8 <text:s text:c="14"/>-1 &lt; 0 → 右邊太長！</text:span><text:span text:style-name="T262"/></text:p>
      <text:p text:style-name="P8"/>
      <text:p text:style-name="P7" loext:marker-style-name="T262"><text:span text:style-name="T262"><text:s text:c="2"/>→ 交換左右，把 8 換到左邊（恢復左偏）：</text:span><text:span text:style-name="T262"/></text:p>
      <text:p text:style-name="P7" loext:marker-style-name="T262"><text:span text:style-name="T262"><text:s text:c="8"/>7 <text:s text:c="2"/>[NPL=0]</text:span><text:span text:style-name="T262"/></text:p>
      <text:p text:style-name="P7" loext:marker-style-name="T262"><text:span text:style-name="T262"><text:s text:c="7"/>/</text:span><text:span text:style-name="T262"/></text:p>
      <text:p text:style-name="P41" loext:marker-style-name="T262"><text:span text:style-name="T262"><text:s text:c="6"/>8</text:span><text:span text:style-name="T262"/></text:p>
      <text:p text:style-name="P6" loext:marker-style-name="T228"><text:span text:style-name="T231">④ 回填到第②層：</text:span><text:span text:style-name="T229">6.left = 12（沒動）、6.right = 剛算好的 7。檢查 NPL(12)=0、NPL(7)=0，相等 → 不用交換。NPL(6)=1+min(0,0)=1。</text:span></text:p>
      <text:p text:style-name="P39" loext:marker-style-name="T262"><text:span text:style-name="T262"><text:s text:c="8"/>6 <text:s text:c="2"/>[NPL=1]</text:span><text:span text:style-name="T262"/></text:p>
      <text:p text:style-name="P7" loext:marker-style-name="T262"><text:span text:style-name="T262"><text:s text:c="7"/>/ \</text:span><text:span text:style-name="T262"/></text:p>
      <text:p text:style-name="P7" loext:marker-style-name="T262"><text:span text:style-name="T262"><text:s text:c="5"/>12 <text:s text:c="2"/>7</text:span><text:span text:style-name="T262"/></text:p>
      <text:p text:style-name="P7" loext:marker-style-name="T262"><text:span text:style-name="T262"><text:s text:c="9"/>/</text:span><text:span text:style-name="T262"/></text:p>
      <text:p text:style-name="P41" loext:marker-style-name="T262"><text:span text:style-name="T262"><text:s text:c="8"/>8</text:span><text:span text:style-name="T262"/></text:p>
      <text:p text:style-name="P6" loext:marker-style-name="T228"><text:span text:style-name="T231">⑤ 回填到第①層：</text:span><text:span text:style-name="T229">3.left = 5（沒動）、3.right = 剛算好的 6。檢查 NPL(右=6)=1 &gt; NPL(左=5)=0 → 交換左右！</text:span></text:p>
      <text:p text:style-name="P39" loext:marker-style-name="T262"><text:span text:style-name="T262"><text:s text:c="2"/>最終結果（Min Leftist Heap）：</text:span><text:span text:style-name="T262"/></text:p>
      <text:p text:style-name="P7" loext:marker-style-name="T262"><text:span text:style-name="T262"><text:s text:c="14"/>3 <text:s text:c="2"/>[NPL=1]</text:span><text:span text:style-name="T262"/></text:p>
      <text:p text:style-name="P7" loext:marker-style-name="T262"><text:span text:style-name="T262"><text:s text:c="13"/>/ \</text:span><text:span text:style-name="T262"/></text:p>
      <text:p text:style-name="P7" loext:marker-style-name="T262"><text:span text:style-name="T262"><text:s text:c="12"/>6 <text:s text:c="2"/>5 <text:s text:c="2"/>[NPL=0]</text:span><text:span text:style-name="T262"/></text:p>
      <text:p text:style-name="P7" loext:marker-style-name="T262"><text:span text:style-name="T262"><text:s text:c="11"/>/ \</text:span><text:span text:style-name="T262"/></text:p>
      <text:p text:style-name="P7" loext:marker-style-name="T262"><text:span text:style-name="T262"><text:s text:c="9"/>12 <text:s text:c="2"/>7 <text:s text:c="2"/>[NPL=0]</text:span><text:span text:style-name="T262"/></text:p>
      <text:p text:style-name="P7" loext:marker-style-name="T262"><text:span text:style-name="T262"><text:s text:c="13"/>/</text:span><text:span text:style-name="T262"/></text:p>
      <text:p text:style-name="P41" loext:marker-style-name="T262"><text:span text:style-name="T262"><text:s text:c="12"/>8</text:span><text:span text:style-name="T262"/></text:p>
      <table:table table:name="表格M10" table:style-name="表格M10">
        <table:table-column table:style-name="表格M10.A"/>
        <table:table-row table:style-name="表格M10.1">
          <table:table-cell table:style-name="表格M10.A1" office:value-type="string">
            <text:p text:style-name="P9" loext:marker-style-name="T230"><text:span text:style-name="T231">驗證一下就安心了：</text:span></text:p>
            <text:p text:style-name="P9" loext:marker-style-name="T245"><text:span text:style-name="T246">Min Heap：3&lt;6、3&lt;5、6&lt;12、6&lt;7、7&lt;8 ✓</text:span></text:p>
            <text:p text:style-name="P43" loext:marker-style-name="T245"><text:span text:style-name="T246">左偏性：NPL(6)=1 ≥ NPL(5)=0、NPL(12)=0 ≥ NPL(7)=0 ✓</text:span></text:p>
          </table:table-cell>
        </table:table-row>
      </table:table>
      <text:p text:style-name="P10"/>
      <text:h text:style-name="P16" text:outline-level="2" loext:marker-style-name="T20"><text:span text:style-name="T20">8-7 <text:s/></text:span><text:span text:style-name="T21">時間複雜度與重點整理</text:span></text:h>
      <text:p text:style-name="P6" loext:marker-style-name="T228"><text:span text:style-name="T229">為什麼 Leftist Heap 快？因為它不重建整棵樹，只沿「被 NPL 保證很短的右路徑」遞迴。</text:span></text:p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285"><text:span text:style-name="T286">操作</text:span><text:span text:style-name="T285"/></text:p>
          </table:table-cell>
          <table:table-cell table:style-name="表格47.A1" office:value-type="string">
            <text:p text:style-name="Standard" loext:marker-style-name="T285"><text:span text:style-name="T286">普通 </text:span><text:span text:style-name="T285">Binary Heap</text:span></text:p>
          </table:table-cell>
          <table:table-cell table:style-name="表格47.A1" office:value-type="string">
            <text:p text:style-name="Standard" loext:marker-style-name="T285"><text:span text:style-name="T285">Leftist Heap</text:span><text:span text:style-name="T285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60"><text:span text:style-name="T260">Insert</text:span><text:span text:style-name="T260"/></text:p>
          </table:table-cell>
          <table:table-cell table:style-name="表格47.A2" office:value-type="string">
            <text:p text:style-name="Standard" loext:marker-style-name="T260"><text:span text:style-name="T260">O(log n)</text:span><text:span text:style-name="T260"/></text:p>
          </table:table-cell>
          <table:table-cell table:style-name="表格47.A2" office:value-type="string">
            <text:p text:style-name="Standard" loext:marker-style-name="T260"><text:span text:style-name="T260">O(log n)</text:span><text:span text:style-name="T260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260"><text:span text:style-name="T260">Extract-Min/Max</text:span><text:span text:style-name="T260"/></text:p>
          </table:table-cell>
          <table:table-cell table:style-name="表格47.A3" office:value-type="string">
            <text:p text:style-name="Standard" loext:marker-style-name="T260"><text:span text:style-name="T260">O(log n)</text:span><text:span text:style-name="T260"/></text:p>
          </table:table-cell>
          <table:table-cell table:style-name="表格47.A3" office:value-type="string">
            <text:p text:style-name="Standard" loext:marker-style-name="T260"><text:span text:style-name="T260">O(log n)</text:span><text:span text:style-name="T260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60"><text:span text:style-name="T260">Merge</text:span><text:span text:style-name="T261">（合併兩個 </text:span><text:span text:style-name="T260">Heap</text:span><text:span text:style-name="T261">）</text:span></text:p>
          </table:table-cell>
          <table:table-cell table:style-name="表格47.A2" office:value-type="string">
            <text:p text:style-name="Standard" loext:marker-style-name="T260"><text:span text:style-name="T260">O(n+m) </text:span><text:span text:style-name="T261">重建</text:span></text:p>
          </table:table-cell>
          <table:table-cell table:style-name="表格47.A2" office:value-type="string">
            <text:p text:style-name="Standard" loext:marker-style-name="T260"><text:span text:style-name="T260">O(log n + log m) ★</text:span><text:span text:style-name="T260"/></text:p>
          </table:table-cell>
        </table:table-row>
      </table:table>
      <text:p text:style-name="P9"/>
      <table:table table:name="表格M11" table:style-name="表格M11">
        <table:table-column table:style-name="表格M11.A"/>
        <text:soft-page-break/>
        <table:table-row table:style-name="表格M11.1">
          <table:table-cell table:style-name="表格M11.A1" office:value-type="string">
            <text:p text:style-name="P9" loext:marker-style-name="T230"><text:span text:style-name="T230">⚠️ 陷阱：Min Leftist Heap vs. Max Leftist Heap</text:span></text:p>
            <text:p text:style-name="P9" loext:marker-style-name="T245"><text:span text:style-name="T246">Min Leftist Heap → Merge 時，</text:span><text:span text:style-name="T232">較小</text:span><text:span text:style-name="T246">的 Root 當新 Root。</text:span></text:p>
            <text:p text:style-name="P9" loext:marker-style-name="T245"><text:span text:style-name="T246">Max Leftist Heap → Merge 時，</text:span><text:span text:style-name="T232">較大</text:span><text:span text:style-name="T246">的 Root 當新 Root。</text:span></text:p>
            <text:p text:style-name="P43" loext:marker-style-name="T245"><text:span text:style-name="T246">四個步驟完全一樣，只有「誰當新 Root」的比較方向相反。考試看清楚題目要的是哪一種！</text:span></text:p>
          </table:table-cell>
        </table:table-row>
      </table:table>
      <text:p text:style-name="P1"/>
      <text:h text:style-name="P13" text:outline-level="1" loext:marker-style-name="T3"><text:span text:style-name="T4">九、</text:span><text:span text:style-name="T10">Heap</text:span><text:span text:style-name="T11"> vs. </text:span><text:span text:style-name="T10">BST / AVL / Red-Black Tree</text:span><text:span text:style-name="T11"> </text:span><text:span text:style-name="T4">深度比較</text:span></text:h>
      <text:p text:style-name="P30" loext:marker-style-name="T30"><text:span text:style-name="T31">這是許多考生最容易混淆的地方，必須徹底釐清各資料結構的設計目的。</text:span><text:span text:style-name="T30"/></text:p>
      <text:p text:style-name="P1"/>
      <text:h text:style-name="P15" text:outline-level="2" loext:marker-style-name="T17"><text:span text:style-name="T18">各結構設計目的一覽</text:span><text:span text:style-name="T17"/></text:h>
      <text:p text:style-name="P1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29" loext:marker-style-name="T5"><text:span text:style-name="T6">結構</text:span><text:span text:style-name="T5"/></text:p>
            </table:table-cell>
            <table:table-cell table:style-name="表格49.A1" office:value-type="string">
              <text:p text:style-name="P29" loext:marker-style-name="T5"><text:span text:style-name="T6">設計目的</text:span><text:span text:style-name="T5"/></text:p>
            </table:table-cell>
            <table:table-cell table:style-name="表格49.A1" office:value-type="string">
              <text:p text:style-name="P29" loext:marker-style-name="T5"><text:span text:style-name="T6">核心保證</text:span><text:span text:style-name="T5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29" loext:marker-style-name="T42"><text:span text:style-name="T49">BST</text:span><text:span text:style-name="T42"/></text:p>
          </table:table-cell>
          <table:table-cell table:style-name="表格49.A2" office:value-type="string">
            <text:p text:style-name="P29" loext:marker-style-name="T42"><text:span text:style-name="T60">快速搜尋特定值</text:span><text:span text:style-name="T42"/></text:p>
          </table:table-cell>
          <table:table-cell table:style-name="表格49.A2" office:value-type="string">
            <text:p text:style-name="P29" loext:marker-style-name="T42"><text:span text:style-name="T60">左 </text:span><text:span text:style-name="T49">&lt; </text:span><text:span text:style-name="T60">根 </text:span><text:span text:style-name="T49">&lt; </text:span><text:span text:style-name="T60">右</text:span></text:p>
          </table:table-cell>
        </table:table-row>
        <table:table-row table:style-name="表格49.1">
          <table:table-cell table:style-name="表格49.A2" office:value-type="string">
            <text:p text:style-name="P29" loext:marker-style-name="T42"><text:span text:style-name="T49">AVL Tree</text:span><text:span text:style-name="T42"/></text:p>
          </table:table-cell>
          <table:table-cell table:style-name="表格49.A2" office:value-type="string">
            <text:p text:style-name="P29" loext:marker-style-name="T42"><text:span text:style-name="T60">平衡 </text:span><text:span text:style-name="T49">BST</text:span><text:span text:style-name="T60">，穩定搜尋</text:span></text:p>
          </table:table-cell>
          <table:table-cell table:style-name="表格49.A2" office:value-type="string">
            <text:p text:style-name="P29" loext:marker-style-name="T42"><text:span text:style-name="T60">高度差 ≤ </text:span><text:span text:style-name="T49">1</text:span><text:span text:style-name="T60">，</text:span><text:span text:style-name="T49">h = O(log n)</text:span></text:p>
          </table:table-cell>
        </table:table-row>
        <table:table-row table:style-name="表格49.1">
          <table:table-cell table:style-name="表格49.A2" office:value-type="string">
            <text:p text:style-name="P29" loext:marker-style-name="T42"><text:span text:style-name="T49">Red-Black Tree</text:span><text:span text:style-name="T42"/></text:p>
          </table:table-cell>
          <table:table-cell table:style-name="表格49.A2" office:value-type="string">
            <text:p text:style-name="P29" loext:marker-style-name="T42"><text:span text:style-name="T60">平衡 </text:span><text:span text:style-name="T49">BST</text:span><text:span text:style-name="T60">，減少旋轉</text:span></text:p>
          </table:table-cell>
          <table:table-cell table:style-name="表格49.A2" office:value-type="string">
            <text:p text:style-name="P29" loext:marker-style-name="T42"><text:span text:style-name="T60">顏色規則，</text:span><text:span text:style-name="T49">h = O(log n)</text:span></text:p>
          </table:table-cell>
        </table:table-row>
        <table:table-row table:style-name="表格49.1">
          <table:table-cell table:style-name="表格49.A2" office:value-type="string">
            <text:p text:style-name="P29" loext:marker-style-name="T42"><text:span text:style-name="T49">Heap</text:span><text:span text:style-name="T42"/></text:p>
          </table:table-cell>
          <table:table-cell table:style-name="表格49.A2" office:value-type="string">
            <text:p text:style-name="P29" loext:marker-style-name="T42"><text:span text:style-name="T60">快速取最大</text:span><text:span text:style-name="T49">/</text:span><text:span text:style-name="T60">最小值</text:span></text:p>
          </table:table-cell>
          <table:table-cell table:style-name="表格49.A2" office:value-type="string">
            <text:p text:style-name="P29" loext:marker-style-name="T42"><text:span text:style-name="T60">父 ≥ 子（</text:span><text:span text:style-name="T49">Max</text:span><text:span text:style-name="T60">）或父 ≤ 子（</text:span><text:span text:style-name="T49">Min</text:span><text:span text:style-name="T60">）</text:span></text:p>
          </table:table-cell>
        </table:table-row>
      </table:table>
      <text:p text:style-name="P1"/>
      <text:h text:style-name="P15" text:outline-level="2" loext:marker-style-name="T17"><text:span text:style-name="T18">時間複雜度全比較</text:span><text:span text:style-name="T17"/></text:h>
      <text:p text:style-name="P1"/>
      <table:table table:name="表格50" table:style-name="表格50">
        <table:table-column table:style-name="表格50.A" table:number-columns-repeated="4"/>
        <table:table-header-rows>
          <table:table-row table:style-name="表格50.1">
            <table:table-cell table:style-name="表格50.A1" office:value-type="string">
              <text:p text:style-name="P29" loext:marker-style-name="T5"><text:span text:style-name="T13">操作</text:span><text:span text:style-name="T5"/></text:p>
            </table:table-cell>
            <table:table-cell table:style-name="表格50.A1" office:value-type="string">
              <text:p text:style-name="P29" loext:marker-style-name="T5"><text:span text:style-name="T14">BST</text:span><text:span text:style-name="T13">（平衡）</text:span><text:span text:style-name="T14">/ AVL / RB</text:span></text:p>
            </table:table-cell>
            <table:table-cell table:style-name="表格50.A1" office:value-type="string">
              <text:p text:style-name="P29" loext:marker-style-name="T5"><text:span text:style-name="T14">Heap</text:span><text:span text:style-name="T5"/></text:p>
            </table:table-cell>
            <table:table-cell table:style-name="表格50.A1" office:value-type="string">
              <text:p text:style-name="P29" loext:marker-style-name="T5"><text:span text:style-name="T13">說明</text:span><text:span text:style-name="T5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29" loext:marker-style-name="T42"><text:span text:style-name="T60">搜尋特定值</text:span><text:span text:style-name="T42"/></text:p>
          </table:table-cell>
          <table:table-cell table:style-name="表格50.A2" office:value-type="string">
            <text:p text:style-name="P29" loext:marker-style-name="T42"><text:span text:style-name="T49">O(log n)</text:span><text:span text:style-name="T42"/></text:p>
          </table:table-cell>
          <table:table-cell table:style-name="表格50.A2" office:value-type="string">
            <text:p text:style-name="P29" loext:marker-style-name="T42"><text:span text:style-name="T49">❌ O(n)</text:span><text:span text:style-name="T42"/></text:p>
          </table:table-cell>
          <table:table-cell table:style-name="表格50.A2" office:value-type="string">
            <text:p text:style-name="P29" loext:marker-style-name="T42"><text:span text:style-name="T49">Heap </text:span><text:span text:style-name="T60">無排序規則</text:span></text:p>
          </table:table-cell>
        </table:table-row>
        <table:table-row table:style-name="表格50.1">
          <table:table-cell table:style-name="表格50.A3" office:value-type="string">
            <text:p text:style-name="P29" loext:marker-style-name="T42"><text:span text:style-name="T60">找最大值（</text:span><text:span text:style-name="T49">view</text:span><text:span text:style-name="T60">）</text:span></text:p>
          </table:table-cell>
          <table:table-cell table:style-name="表格50.A3" office:value-type="string">
            <text:p text:style-name="P29" loext:marker-style-name="T42"><text:span text:style-name="T49">O(log n)</text:span><text:span text:style-name="T42"/></text:p>
          </table:table-cell>
          <table:table-cell table:style-name="表格50.A3" office:value-type="string">
            <text:p text:style-name="P29" loext:marker-style-name="T42"><text:span text:style-name="T49">✅ O(1)</text:span><text:span text:style-name="T42"/></text:p>
          </table:table-cell>
          <table:table-cell table:style-name="表格50.A3" office:value-type="string">
            <text:p text:style-name="P29" loext:marker-style-name="T42"><text:span text:style-name="T49">Heap Root </text:span><text:span text:style-name="T60">即最大值</text:span></text:p>
          </table:table-cell>
        </table:table-row>
        <table:table-row table:style-name="表格50.1">
          <table:table-cell table:style-name="表格50.A2" office:value-type="string">
            <text:p text:style-name="P29" loext:marker-style-name="T42"><text:span text:style-name="T49">Extract-Max</text:span><text:span text:style-name="T42"/></text:p>
          </table:table-cell>
          <table:table-cell table:style-name="表格50.A2" office:value-type="string">
            <text:p text:style-name="P29" loext:marker-style-name="T42"><text:span text:style-name="T49">O(log n)</text:span><text:span text:style-name="T42"/></text:p>
          </table:table-cell>
          <table:table-cell table:style-name="表格50.A2" office:value-type="string">
            <text:p text:style-name="P29" loext:marker-style-name="T42"><text:span text:style-name="T49">O(log n)</text:span><text:span text:style-name="T42"/></text:p>
          </table:table-cell>
          <table:table-cell table:style-name="表格50.A2" office:value-type="string">
            <text:p text:style-name="P29" loext:marker-style-name="T42"><text:span text:style-name="T60">相同</text:span><text:span text:style-name="T42"/></text:p>
          </table:table-cell>
        </table:table-row>
        <table:table-row table:style-name="表格50.1">
          <table:table-cell table:style-name="表格50.A3" office:value-type="string">
            <text:p text:style-name="P29" loext:marker-style-name="T42"><text:span text:style-name="T49">Insert</text:span><text:span text:style-name="T42"/></text:p>
          </table:table-cell>
          <table:table-cell table:style-name="表格50.A3" office:value-type="string">
            <text:p text:style-name="P29" loext:marker-style-name="T42"><text:span text:style-name="T49">O(log n)</text:span><text:span text:style-name="T42"/></text:p>
          </table:table-cell>
          <table:table-cell table:style-name="表格50.A3" office:value-type="string">
            <text:p text:style-name="P29" loext:marker-style-name="T42"><text:span text:style-name="T49">O(log n)</text:span><text:span text:style-name="T42"/></text:p>
          </table:table-cell>
          <table:table-cell table:style-name="表格50.A3" office:value-type="string">
            <text:p text:style-name="P29" loext:marker-style-name="T42"><text:span text:style-name="T60">相同</text:span><text:span text:style-name="T42"/></text:p>
          </table:table-cell>
        </table:table-row>
        <table:table-row table:style-name="表格50.1">
          <table:table-cell table:style-name="表格50.A2" office:value-type="string">
            <text:p text:style-name="P29" loext:marker-style-name="T42"><text:span text:style-name="T49">Delete </text:span><text:span text:style-name="T60">任意</text:span></text:p>
          </table:table-cell>
          <table:table-cell table:style-name="表格50.A2" office:value-type="string">
            <text:p text:style-name="P29" loext:marker-style-name="T42"><text:span text:style-name="T49">O(log n)</text:span><text:span text:style-name="T42"/></text:p>
          </table:table-cell>
          <table:table-cell table:style-name="表格50.A2" office:value-type="string">
            <text:p text:style-name="P29" loext:marker-style-name="T42"><text:span text:style-name="T49">O(n) </text:span><text:span text:style-name="T60">找 </text:span><text:span text:style-name="T49">+ O(log n) </text:span><text:span text:style-name="T60">刪</text:span></text:p>
          </table:table-cell>
          <table:table-cell table:style-name="表格50.A2" office:value-type="string">
            <text:p text:style-name="P29" loext:marker-style-name="T42"><text:span text:style-name="T49">Heap </text:span><text:span text:style-name="T60">找到要刪的節點要 </text:span><text:span text:style-name="T49">O(n)</text:span></text:p>
          </table:table-cell>
        </table:table-row>
      </table:table>
      <text:p text:style-name="P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3" loext:marker-style-name="T42"><text:span text:style-name="T49">⚠️ <text:s/></text:span><text:span text:style-name="T60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3" loext:marker-style-name="T42"><text:span text:style-name="T60">「</text:span><text:span text:style-name="T49">Max Heap </text:span><text:span text:style-name="T60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3"/>
          </table:table-cell>
        </table:table-row>
        <table:table-row table:style-name="表格51.1">
          <table:table-cell table:style-name="表格51.A1" office:value-type="string">
            <text:p text:style-name="P3" loext:marker-style-name="T42"><text:span text:style-name="T49">❌ </text:span><text:span text:style-name="T60">錯誤答案：</text:span><text:span text:style-name="T49">O(log n) <text:s/>← </text:span><text:span text:style-name="T60">看到樹就聯想 </text:span><text:span text:style-name="T49">log n </text:span><text:span text:style-name="T60">是常見誤區</text:span></text:p>
          </table:table-cell>
        </table:table-row>
        <text:soft-page-break/>
        <table:table-row table:style-name="表格51.1">
          <table:table-cell table:style-name="表格51.A1" office:value-type="string">
            <text:p text:style-name="P3" loext:marker-style-name="T42"><text:span text:style-name="T49">✅ </text:span><text:span text:style-name="T60">正確答案：</text:span><text:span text:style-name="T49">O(n)</text:span></text:p>
          </table:table-cell>
        </table:table-row>
        <table:table-row table:style-name="表格51.1">
          <table:table-cell table:style-name="表格51.A1" office:value-type="string">
            <text:p text:style-name="P3"/>
          </table:table-cell>
        </table:table-row>
        <table:table-row table:style-name="表格51.1">
          <table:table-cell table:style-name="表格51.A1" office:value-type="string">
            <text:p text:style-name="P3" loext:marker-style-name="T42"><text:span text:style-name="T60">原因：</text:span><text:span text:style-name="T49">Heap </text:span><text:span text:style-name="T60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3" loext:marker-style-name="T42"><text:span text:style-name="T49"><text:s text:c="6"/></text:span><text:span text:style-name="T60">最壞情況需掃描所有節點。</text:span></text:p>
          </table:table-cell>
        </table:table-row>
      </table:table>
      <text:p text:style-name="P1"/>
      <text:h text:style-name="P15" text:outline-level="2" loext:marker-style-name="T17"><text:span text:style-name="T18">為什麼 </text:span><text:span text:style-name="T26">Linux</text:span><text:span text:style-name="T27"> </text:span><text:span text:style-name="T18">選擇 </text:span><text:span text:style-name="T26">Red-Black Tree</text:span><text:span text:style-name="T27"> </text:span><text:span text:style-name="T18">而非 </text:span><text:span text:style-name="T26">AVL</text:span><text:span text:style-name="T18">？</text:span></text:h>
      <text:list text:continue-list="list3456818150" text:style-name="WWNum2">
        <text:list-item>
          <text:p text:style-name="P37" loext:marker-style-name="T30"><text:span text:style-name="T48">AVL</text:span><text:span text:style-name="T31">：搜尋最快，但插入</text:span><text:span text:style-name="T48">/</text:span><text:span text:style-name="T31">刪除旋轉次數多，修改成本高。</text:span></text:p>
        </text:list-item>
        <text:list-item>
          <text:p text:style-name="P37" loext:marker-style-name="T30"><text:span text:style-name="T48">Red-Black Tree</text:span><text:span text:style-name="T31">：搜尋稍慢，但插入</text:span><text:span text:style-name="T48">/</text:span><text:span text:style-name="T31">刪除旋轉較少，整體效能均衡。</text:span></text:p>
        </text:list-item>
        <text:list-item>
          <text:p text:style-name="P37" loext:marker-style-name="T30"><text:span text:style-name="T48">Linux Kernel </text:span><text:span text:style-name="T31">的 </text:span><text:span text:style-name="T48">CFS </text:span><text:span text:style-name="T31">排程器、記憶體管理（</text:span><text:span text:style-name="T48">VMA</text:span><text:span text:style-name="T31">）、</text:span><text:span text:style-name="T48">Timer </text:span><text:span text:style-name="T31">均採用 </text:span><text:span text:style-name="T48">Red-Black Tree</text:span><text:span text:style-name="T31">。</text:span></text:p>
        </text:list-item>
      </text:list>
      <text:p text:style-name="P1"/>
      <text:p text:style-name="P1"/>
      <text:h text:style-name="P13" text:outline-level="1" loext:marker-style-name="T3"><text:span text:style-name="T4">十、公職考試常見陷阱整理</text:span><text:span text:style-name="T3"/></text:h>
      <text:p text:style-name="P1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1</text:span><text:span text:style-name="T60">：</text:span><text:span text:style-name="T49">Heap </text:span><text:span text:style-name="T60">搜尋 ≠ </text:span><text:span text:style-name="T49">O(log n)</text:span><text:span text:style-name="T60">，正確為 </text:span><text:span text:style-name="T49">O(n)</text:span><text:span text:style-name="T60">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2</text:span><text:span text:style-name="T60">：</text:span><text:span text:style-name="T49">Build Heap ≠ O(n log n)</text:span><text:span text:style-name="T60">，</text:span><text:span text:style-name="T49">Bottom-Up </text:span><text:span text:style-name="T60">法正確為 </text:span><text:span text:style-name="T49">O(n)</text:span><text:span text:style-name="T60">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3</text:span><text:span text:style-name="T60">：</text:span><text:span text:style-name="T49">Heap </text:span><text:span text:style-name="T60">是 </text:span><text:span text:style-name="T49">Complete Binary Tree</text:span><text:span text:style-name="T60">，不是 </text:span><text:span text:style-name="T49">Full Binary Tree</text:span><text:span text:style-name="T60">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4</text:span><text:span text:style-name="T60">：陣列索引從 </text:span><text:span text:style-name="T49">1 </text:span><text:span text:style-name="T60">開始，</text:span><text:span text:style-name="T49">parent = ⌊i/2⌋</text:span><text:span text:style-name="T60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5</text:span><text:span text:style-name="T60">：</text:span><text:span text:style-name="T49">Interval Heap </text:span><text:span text:style-name="T60">每個節點存的是區間 </text:span><text:span text:style-name="T49">[min, max]</text:span><text:span text:style-name="T60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6</text:span><text:span text:style-name="T60">：</text:span><text:span text:style-name="T49">Merge Leftist Heap </text:span><text:span text:style-name="T60">的新 </text:span><text:span text:style-name="T49">Root </text:span><text:span text:style-name="T60">是兩個 </text:span><text:span text:style-name="T49">Root </text:span><text:span text:style-name="T60">中較小的（</text:span><text:span text:style-name="T49">Min Heap</text:span><text:span text:style-name="T60">），</text:span></text:p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49"><text:s text:c="8"/>Max Leftist Heap </text:span><text:span text:style-name="T60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7</text:span><text:span text:style-name="T60">：</text:span><text:span text:style-name="T49">Heap Sort </text:span><text:span text:style-name="T60">是 </text:span><text:span text:style-name="T49">Unstable Sort</text:span><text:span text:style-name="T60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8</text:span><text:span text:style-name="T60">：</text:span><text:span text:style-name="T49">Heap Sort </text:span><text:span text:style-name="T60">空間複雜度是 </text:span><text:span text:style-name="T49">O(1)</text:span><text:span text:style-name="T60">（</text:span><text:span text:style-name="T49">In-place</text:span><text:span text:style-name="T60">），不需額外空間。</text:span></text:p>
          </table:table-cell>
        </table:table-row>
      </table:table>
      <text:p text:style-name="P1"/>
      <text:p text:style-name="P1"/>
      <text:h text:style-name="P13" text:outline-level="1" loext:marker-style-name="T3"><text:soft-page-break/><text:span text:style-name="T4">十一、考試必背速查表（最終記憶版）</text:span><text:span text:style-name="T3"/></text:h>
      <text:p text:style-name="P1"/>
      <text:h text:style-name="P15" text:outline-level="2" loext:marker-style-name="T17"><text:span text:style-name="T18">核心定義</text:span><text:span text:style-name="T17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3" loext:marker-style-name="T42"><text:span text:style-name="T49">Heap = Complete Binary Tree + Heap Property</text:span><text:span text:style-name="T60">（</text:span><text:span text:style-name="T49">parent ≤/≥ child</text:span><text:span text:style-name="T60">）</text:span></text:p>
          </table:table-cell>
        </table:table-row>
        <table:table-row table:style-name="表格53.1">
          <table:table-cell table:style-name="表格53.A1" office:value-type="string">
            <text:p text:style-name="P3"/>
          </table:table-cell>
        </table:table-row>
        <table:table-row table:style-name="表格53.1">
          <table:table-cell table:style-name="表格53.A1" office:value-type="string">
            <text:p text:style-name="P3" loext:marker-style-name="T42"><text:span text:style-name="T60">陣列索引（從 </text:span><text:span text:style-name="T49">1 </text:span><text:span text:style-name="T60">起）：</text:span></text:p>
          </table:table-cell>
        </table:table-row>
        <table:table-row table:style-name="表格53.1">
          <table:table-cell table:style-name="表格53.A1" office:value-type="string">
            <text:p text:style-name="P3" loext:marker-style-name="T42"><text:span text:style-name="T49"><text:s text:c="2"/>Root <text:s text:c="4"/>= A[1]</text:span><text:span text:style-name="T42"/></text:p>
          </table:table-cell>
        </table:table-row>
        <table:table-row table:style-name="表格53.1">
          <table:table-cell table:style-name="表格53.A1" office:value-type="string">
            <text:p text:style-name="P3" loext:marker-style-name="T42"><text:span text:style-name="T49"><text:s text:c="2"/>Parent(i) = A[⌊i/2⌋]</text:span><text:span text:style-name="T42"/></text:p>
          </table:table-cell>
        </table:table-row>
        <table:table-row table:style-name="表格53.1">
          <table:table-cell table:style-name="表格53.A1" office:value-type="string">
            <text:p text:style-name="P3" loext:marker-style-name="T42"><text:span text:style-name="T49"><text:s text:c="2"/>Left(i) <text:s/>= A[2i]</text:span><text:span text:style-name="T42"/></text:p>
          </table:table-cell>
        </table:table-row>
        <table:table-row table:style-name="表格53.1">
          <table:table-cell table:style-name="表格53.A1" office:value-type="string">
            <text:p text:style-name="P3" loext:marker-style-name="T42"><text:span text:style-name="T49"><text:s text:c="2"/>Right(i) = A[2i+1]</text:span><text:span text:style-name="T42"/></text:p>
          </table:table-cell>
        </table:table-row>
      </table:table>
      <text:p text:style-name="P1"/>
      <text:h text:style-name="P15" text:outline-level="2" loext:marker-style-name="T17"><text:span text:style-name="T18">時間複雜度速查</text:span><text:span text:style-name="T17"/></text:h>
      <text:p text:style-name="P1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9" loext:marker-style-name="T5"><text:span text:style-name="T6">操作</text:span><text:span text:style-name="T5"/></text:p>
            </table:table-cell>
            <table:table-cell table:style-name="表格54.A1" office:value-type="string">
              <text:p text:style-name="P29" loext:marker-style-name="T5"><text:span text:style-name="T6">時間複雜度</text:span><text:span text:style-name="T5"/></text:p>
            </table:table-cell>
            <table:table-cell table:style-name="表格54.A1" office:value-type="string">
              <text:p text:style-name="P29" loext:marker-style-name="T5"><text:span text:style-name="T6">原因</text:span><text:span text:style-name="T5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9" loext:marker-style-name="T42"><text:span text:style-name="T49">Insert</text:span><text:span text:style-name="T60">（</text:span><text:span text:style-name="T49">Bubble Up</text:span><text:span text:style-name="T60">）</text:span></text:p>
          </table:table-cell>
          <table:table-cell table:style-name="表格54.A2" office:value-type="string">
            <text:p text:style-name="P29" loext:marker-style-name="T42"><text:span text:style-name="T49">O(log n)</text:span><text:span text:style-name="T42"/></text:p>
          </table:table-cell>
          <table:table-cell table:style-name="表格54.A2" office:value-type="string">
            <text:p text:style-name="P29" loext:marker-style-name="T42"><text:span text:style-name="T60">最多走 </text:span><text:span text:style-name="T49">h = log n </text:span><text:span text:style-name="T60">層</text:span></text:p>
          </table:table-cell>
        </table:table-row>
        <table:table-row table:style-name="表格54.1">
          <table:table-cell table:style-name="表格54.A2" office:value-type="string">
            <text:p text:style-name="P29" loext:marker-style-name="T42"><text:span text:style-name="T49">Extract-Max</text:span><text:span text:style-name="T60">（</text:span><text:span text:style-name="T49">Heapify</text:span><text:span text:style-name="T60">）</text:span></text:p>
          </table:table-cell>
          <table:table-cell table:style-name="表格54.A2" office:value-type="string">
            <text:p text:style-name="P29" loext:marker-style-name="T42"><text:span text:style-name="T49">O(log n)</text:span><text:span text:style-name="T42"/></text:p>
          </table:table-cell>
          <table:table-cell table:style-name="表格54.A2" office:value-type="string">
            <text:p text:style-name="P29" loext:marker-style-name="T42"><text:span text:style-name="T60">最多走 </text:span><text:span text:style-name="T49">h = log n </text:span><text:span text:style-name="T60">層</text:span></text:p>
          </table:table-cell>
        </table:table-row>
        <table:table-row table:style-name="表格54.1">
          <table:table-cell table:style-name="表格54.A2" office:value-type="string">
            <text:p text:style-name="P29" loext:marker-style-name="T42"><text:span text:style-name="T49">Build Heap</text:span><text:span text:style-name="T60">（</text:span><text:span text:style-name="T49">Bottom-Up</text:span><text:span text:style-name="T60">）</text:span></text:p>
          </table:table-cell>
          <table:table-cell table:style-name="表格54.A2" office:value-type="string">
            <text:p text:style-name="P29" loext:marker-style-name="T42"><text:span text:style-name="T49">O(n) ★</text:span><text:span text:style-name="T42"/></text:p>
          </table:table-cell>
          <table:table-cell table:style-name="表格54.A2" office:value-type="string">
            <text:p text:style-name="P29" loext:marker-style-name="T42"><text:span text:style-name="T49">Floyd </text:span><text:span text:style-name="T60">演算法</text:span></text:p>
          </table:table-cell>
        </table:table-row>
        <table:table-row table:style-name="表格54.1">
          <table:table-cell table:style-name="表格54.A2" office:value-type="string">
            <text:p text:style-name="P29" loext:marker-style-name="T42"><text:span text:style-name="T60">逐個 </text:span><text:span text:style-name="T49">Insert </text:span><text:span text:style-name="T60">建 </text:span><text:span text:style-name="T49">Heap</text:span></text:p>
          </table:table-cell>
          <table:table-cell table:style-name="表格54.A2" office:value-type="string">
            <text:p text:style-name="P29" loext:marker-style-name="T42"><text:span text:style-name="T49">O(n log n)</text:span><text:span text:style-name="T42"/></text:p>
          </table:table-cell>
          <table:table-cell table:style-name="表格54.A2" office:value-type="string">
            <text:p text:style-name="P29" loext:marker-style-name="T42"><text:span text:style-name="T49">n </text:span><text:span text:style-name="T60">次 </text:span><text:span text:style-name="T49">× O(log n)</text:span></text:p>
          </table:table-cell>
        </table:table-row>
        <table:table-row table:style-name="表格54.1">
          <table:table-cell table:style-name="表格54.A2" office:value-type="string">
            <text:p text:style-name="P29" loext:marker-style-name="T42"><text:span text:style-name="T49">Heap Sort</text:span><text:span text:style-name="T42"/></text:p>
          </table:table-cell>
          <table:table-cell table:style-name="表格54.A2" office:value-type="string">
            <text:p text:style-name="P29" loext:marker-style-name="T42"><text:span text:style-name="T49">O(n log n)</text:span><text:span text:style-name="T42"/></text:p>
          </table:table-cell>
          <table:table-cell table:style-name="表格54.A2" office:value-type="string">
            <text:p text:style-name="P29" loext:marker-style-name="T42"><text:span text:style-name="T49">O(n) + O(n log n)</text:span><text:span text:style-name="T42"/></text:p>
          </table:table-cell>
        </table:table-row>
        <table:table-row table:style-name="表格54.1">
          <table:table-cell table:style-name="表格54.A2" office:value-type="string">
            <text:p text:style-name="P29" loext:marker-style-name="T42"><text:span text:style-name="T60">搜尋特定值</text:span><text:span text:style-name="T42"/></text:p>
          </table:table-cell>
          <table:table-cell table:style-name="表格54.A2" office:value-type="string">
            <text:p text:style-name="P29" loext:marker-style-name="T42"><text:span text:style-name="T49">O(n)</text:span><text:span text:style-name="T42"/></text:p>
          </table:table-cell>
          <table:table-cell table:style-name="表格54.A2" office:value-type="string">
            <text:p text:style-name="P29" loext:marker-style-name="T42"><text:span text:style-name="T60">無左右排序規則</text:span><text:span text:style-name="T42"/></text:p>
          </table:table-cell>
        </table:table-row>
        <table:table-row table:style-name="表格54.1">
          <table:table-cell table:style-name="表格54.A2" office:value-type="string">
            <text:p text:style-name="P29" loext:marker-style-name="T42"><text:span text:style-name="T49">Merge (Leftist Heap)</text:span><text:span text:style-name="T42"/></text:p>
          </table:table-cell>
          <table:table-cell table:style-name="表格54.A2" office:value-type="string">
            <text:p text:style-name="P29" loext:marker-style-name="T42"><text:span text:style-name="T49">O(log n + log m)</text:span><text:span text:style-name="T42"/></text:p>
          </table:table-cell>
          <table:table-cell table:style-name="表格54.A2" office:value-type="string">
            <text:p text:style-name="P29" loext:marker-style-name="T42"><text:span text:style-name="T60">右側路徑短</text:span><text:span text:style-name="T42"/></text:p>
          </table:table-cell>
        </table:table-row>
      </table:table>
      <text:p text:style-name="P1"/>
      <text:h text:style-name="P15" text:outline-level="2" loext:marker-style-name="T17"><text:span text:style-name="T27">Priority Queue </text:span><text:span text:style-name="T18">三種實作比較</text:span></text:h>
      <text:p text:style-name="P1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29" loext:marker-style-name="T5"><text:span text:style-name="T6">實作</text:span><text:span text:style-name="T5"/></text:p>
            </table:table-cell>
            <table:table-cell table:style-name="表格55.A1" office:value-type="string">
              <text:p text:style-name="P29" loext:marker-style-name="T5"><text:span text:style-name="T13">Insert</text:span><text:span text:style-name="T5"/></text:p>
            </table:table-cell>
            <table:table-cell table:style-name="表格55.A1" office:value-type="string">
              <text:p text:style-name="P29" loext:marker-style-name="T5"><text:span text:style-name="T13">Extract-Max</text:span><text:span text:style-name="T5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9" loext:marker-style-name="T42"><text:span text:style-name="T60">排序陣列</text:span><text:span text:style-name="T42"/></text:p>
          </table:table-cell>
          <table:table-cell table:style-name="表格55.A2" office:value-type="string">
            <text:p text:style-name="P29" loext:marker-style-name="T42"><text:span text:style-name="T49">O(n)</text:span><text:span text:style-name="T42"/></text:p>
          </table:table-cell>
          <table:table-cell table:style-name="表格55.A2" office:value-type="string">
            <text:p text:style-name="P29" loext:marker-style-name="T42"><text:span text:style-name="T49">O(1) <text:s/></text:span><text:span text:style-name="T60">取快插慢</text:span></text:p>
          </table:table-cell>
        </table:table-row>
        <table:table-row table:style-name="表格55.1">
          <table:table-cell table:style-name="表格55.A2" office:value-type="string">
            <text:p text:style-name="P29" loext:marker-style-name="T42"><text:span text:style-name="T60">未排序陣列</text:span><text:span text:style-name="T42"/></text:p>
          </table:table-cell>
          <table:table-cell table:style-name="表格55.A2" office:value-type="string">
            <text:p text:style-name="P29" loext:marker-style-name="T42"><text:span text:style-name="T49">O(1)</text:span><text:span text:style-name="T42"/></text:p>
          </table:table-cell>
          <table:table-cell table:style-name="表格55.A2" office:value-type="string">
            <text:p text:style-name="P29" loext:marker-style-name="T42"><text:span text:style-name="T49">O(n) <text:s/></text:span><text:span text:style-name="T60">插快取慢</text:span></text:p>
          </table:table-cell>
        </table:table-row>
        <table:table-row table:style-name="表格55.1">
          <table:table-cell table:style-name="表格55.A4" office:value-type="string">
            <text:p text:style-name="P29" loext:marker-style-name="T42"><text:span text:style-name="T49">Max Heap ★</text:span><text:span text:style-name="T42"/></text:p>
          </table:table-cell>
          <table:table-cell table:style-name="表格55.A4" office:value-type="string">
            <text:p text:style-name="P29" loext:marker-style-name="T42"><text:span text:style-name="T49">O(log n)</text:span><text:span text:style-name="T42"/></text:p>
          </table:table-cell>
          <table:table-cell table:style-name="表格55.A4" office:value-type="string">
            <text:p text:style-name="P29" loext:marker-style-name="T42"><text:span text:style-name="T49">O(log n) <text:s/></text:span><text:span text:style-name="T60">最均衡</text:span></text:p>
          </table:table-cell>
        </table:table-row>
      </table:table>
      <text:p text:style-name="P1"/>
      <text:h text:style-name="P15" text:outline-level="2" loext:marker-style-name="T17"><text:span text:style-name="T27">8 </text:span><text:span text:style-name="T18">句考試必背口訣</text:span></text:h>
      <text:p text:style-name="P1"/>
      <table:table table:name="表格56" table:style-name="表格56">
        <table:table-column table:style-name="表格56.A"/>
        <text:soft-page-break/>
        <table:table-row table:style-name="表格56.1">
          <table:table-cell table:style-name="表格56.A1" office:value-type="string">
            <text:p text:style-name="P3" loext:marker-style-name="T42"><text:span text:style-name="T49">1. <text:s/>Heap = Complete BT + Heap Property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3" loext:marker-style-name="T42"><text:span text:style-name="T49">2. <text:s/>parent = A[⌊i/2⌋]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3" loext:marker-style-name="T42"><text:span text:style-name="T49">3. <text:s/>left child = A[2i]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3" loext:marker-style-name="T42"><text:span text:style-name="T49">4. <text:s/>right child = A[2i+1]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3" loext:marker-style-name="T42"><text:span text:style-name="T49">5. <text:s/>Insert → Bubble Up → O(log n)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3" loext:marker-style-name="T42"><text:span text:style-name="T49">6. <text:s/>Delete/Extract → Heapify</text:span><text:span text:style-name="T60">（</text:span><text:span text:style-name="T49">Bubble Down</text:span><text:span text:style-name="T60">）→ </text:span><text:span text:style-name="T49">O(log n)</text:span></text:p>
          </table:table-cell>
        </table:table-row>
        <table:table-row table:style-name="表格56.1">
          <table:table-cell table:style-name="表格56.A1" office:value-type="string">
            <text:p text:style-name="P3" loext:marker-style-name="T42"><text:span text:style-name="T49">7. <text:s/>Build Heap</text:span><text:span text:style-name="T60">（</text:span><text:span text:style-name="T49">Bottom-Up</text:span><text:span text:style-name="T60">）</text:span><text:span text:style-name="T49">= O(n) <text:s/>★ </text:span><text:span text:style-name="T60">非 </text:span><text:span text:style-name="T49">O(n log n)</text:span></text:p>
          </table:table-cell>
        </table:table-row>
        <table:table-row table:style-name="表格56.1">
          <table:table-cell table:style-name="表格56.A1" office:value-type="string">
            <text:p text:style-name="P3" loext:marker-style-name="T42"><text:span text:style-name="T49">8. <text:s/>Heap Sort = O(n log n)</text:span><text:span text:style-name="T60">，</text:span><text:span text:style-name="T49">In-place</text:span><text:span text:style-name="T60">，</text:span><text:span text:style-name="T49">Unstabl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3T00:14:26</meta:creation-date>
    <meta:initial-creator>Un-named</meta:initial-creator>
    <dc:language>en-US</dc:language>
    <dc:date>2026-06-25T15:30:02.660000000</dc:date>
    <meta:editing-cycles>235</meta:editing-cycles>
    <meta:editing-duration>P1DT3H26M7S</meta:editing-duration>
    <meta:generator>MODA_ODF_Application_Tools/3.8.4.2$Windows_X86_64 LibreOffice_project/4fb77107d5af14329e08085efe4fa19b5633383a</meta:generator>
    <meta:document-statistic meta:table-count="61" meta:image-count="0" meta:object-count="0" meta:page-count="32" meta:paragraph-count="875" meta:word-count="8214" meta:character-count="20577" meta:non-whitespace-character-count="13738"/>
    <meta:user-defined meta:name="AppVersion">15.0000</meta:user-defined>
  </office:meta>
</office:document-meta>
</file>