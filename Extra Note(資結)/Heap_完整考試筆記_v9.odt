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16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17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22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23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24" style:family="paragraph" style:parent-style-name="Standard" style:list-style-name="WWNum2">
      <style:paragraph-properties fo:margin-top="0.071cm" fo:margin-bottom="0.071cm" style:contextual-spacing="false"/>
    </style:style>
    <style:style style:name="P25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2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8" style:family="paragraph" style:parent-style-name="Standard">
      <style:paragraph-properties fo:margin-top="0cm" fo:margin-bottom="0.212cm" style:contextual-spacing="false"/>
    </style:style>
    <style:style style:name="P29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32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33" style:family="paragraph" style:parent-style-name="Standard">
      <style:paragraph-properties fo:margin-top="0cm" fo:margin-bottom="0.141cm" style:contextual-spacing="false"/>
    </style:style>
    <style:style style:name="P34" style:family="paragraph" style:parent-style-name="List_20_Paragraph" style:list-style-name="WWNum14">
      <style:paragraph-properties fo:margin-top="0cm" fo:margin-bottom="0.141cm" style:contextual-spacing="false"/>
    </style:style>
    <style:style style:name="P35" style:family="paragraph" style:parent-style-name="Standard">
      <style:paragraph-properties fo:margin-top="0cm" fo:margin-bottom="0cm" style:contextual-spacing="false"/>
    </style:style>
    <style:style style:name="P36" style:family="paragraph" style:parent-style-name="Standard">
      <style:paragraph-properties fo:margin-top="0cm" fo:margin-bottom="0.282cm" style:contextual-spacing="false"/>
    </style:style>
    <style:style style:name="P37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38" style:family="paragraph" style:parent-style-name="Standard">
      <style:paragraph-properties fo:margin-top="0.353cm" fo:margin-bottom="0.176cm" style:contextual-spacing="false"/>
    </style:style>
    <style:style style:name="P39" style:family="paragraph" style:parent-style-name="Standard">
      <style:paragraph-properties fo:margin-top="0cm" fo:margin-bottom="0.071cm" style:contextual-spacing="false"/>
    </style:style>
    <style:style style:name="P4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41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43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44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45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47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4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9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53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60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62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63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6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67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68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9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595959" loext:opacity="100%" fo:font-size="11pt" style:font-size-asian="11pt" style:font-name-complex="Arial2" style:font-size-complex="11pt"/>
    </style:style>
    <style:style style:name="T72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75" style:family="text">
      <style:text-properties fo:color="#595959" loext:opacity="100%" fo:font-size="10.5pt" style:font-size-asian="10.5pt" style:font-name-complex="Arial2" style:font-size-complex="10.5pt"/>
    </style:style>
    <style:style style:name="T76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8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9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82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88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9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90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96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98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04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05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06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11" style:family="text">
      <style:text-properties fo:font-weight="bold" fo:background-color="#ffd740" loext:char-shading-value="0" style:font-weight-asian="bold" style:font-weight-complex="bold"/>
    </style:style>
    <style:style style:name="T112" style:family="text">
      <style:text-properties fo:font-weight="bold" fo:background-color="#18ffff" loext:char-shading-value="0" style:font-weight-asian="bold" style:font-weight-complex="bold"/>
    </style:style>
    <style:style style:name="T113" style:family="text">
      <style:text-properties fo:font-weight="bold" fo:background-color="#ffff00" loext:char-shading-value="0" style:font-weight-asian="bold" style:font-weight-complex="bold"/>
    </style:style>
    <style:style style:name="T114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15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8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19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20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21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30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1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3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34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137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138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139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140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1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142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47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48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49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50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51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52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53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54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55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56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7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8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0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61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65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66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67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69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0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71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2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3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74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75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76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77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78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79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80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1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2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83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84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85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6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88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9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90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91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92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93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94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5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6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7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98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99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200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01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02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03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04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205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6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07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08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09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10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1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2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13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14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5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16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17" style:family="text">
      <style:text-properties fo:font-size="10.5pt" style:font-name-asian="Arial2" style:font-size-asian="10.5pt" style:font-name-complex="Arial2" style:font-size-complex="10.5pt"/>
    </style:style>
    <style:style style:name="T218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19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20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21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2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23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4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25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26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27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8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9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0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31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1858012492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42">Parent = A[5/2] = A[2] </text:span><text:span text:style-name="T23">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</text:span><text:span text:style-name="T43">Left child = A[10]</text:span><text:span text:style-name="T24">，</text:span><text:span text:style-name="T44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5">陣列索引從 </text:span><text:span text:style-name="T38">1 </text:span><text:span text:style-name="T45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</text:span><text:span text:style-name="T46">預設從 </text:span><text:span text:style-name="T47">1 </text:span><text:span text:style-name="T46">開始</text:span><text:span text:style-name="T24">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224503465643111" text:continue-list="list1858012492" text:style-name="WWNum7">
        <text:list-item>
          <text:p text:style-name="P11" loext:marker-style-name="T16"><text:span text:style-name="T48">Step 1</text:span><text:span text:style-name="T18">：</text:span><text:span text:style-name="T49">將新元素放到陣列最後一個位置</text:span><text:span text:style-name="T18">（</text:span><text:span text:style-name="T48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8">Step 2</text:span><text:span text:style-name="T18">：</text:span><text:span text:style-name="T50">與父節點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9">
          <text:p text:style-name="P13" loext:marker-style-name="T16"><text:span text:style-name="T48">Step 3</text:span><text:span text:style-name="T18">：重複 </text:span><text:span text:style-name="T48">Step 2</text:span><text:span text:style-name="T18">，一路往上，直到滿足 </text:span><text:span text:style-name="T48">Heap Property </text:span><text:span text:style-name="T18">或抵達 </text:span><text:span text:style-name="T48">Root </text:span><text:span text:style-name="T18">為止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插入 </text:span><text:span text:style-name="T53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54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55">95 </text:span><text:span text:style-name="T56">的 </text:span><text:span text:style-name="T55">parent = A[7/2] = A[3]</text:span><text:span text:style-name="T23">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7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8">95</text:span><text:span text:style-name="T23">, 70, 60, 50, </text:span><text:span text:style-name="T58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55">95 </text:span><text:span text:style-name="T56">的 </text:span><text:span text:style-name="T55">parent = A[3/2] = A[1]</text:span><text:span text:style-name="T23">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7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15" loext:marker-style-name="T22"><text:span text:style-name="T23"><text:s text:c="5"/>/ <text:s/>\ <text:s text:c="2"/>/</text:span><text:span text:style-name="T2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16" loext:marker-style-name="T22"><text:s/><text:span text:style-name="T23">70 <text:s/>60 50 <text:s/>80</text:span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9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224503227882966" text:continue-list="list224503465643111" text:style-name="WWNum10">
        <text:list-item>
          <text:p text:style-name="P17" loext:marker-style-name="T16"><text:span text:style-name="T48">Step 1</text:span><text:span text:style-name="T18">：</text:span><text:span text:style-name="T49">取出 </text:span><text:span text:style-name="T60">Root</text:span><text:span text:style-name="T49">（最大值）</text:span><text:span text:style-name="T18">。</text:span></text:p>
        </text:list-item>
        <text:list-item text:style-override="WWNum11">
          <text:p text:style-name="P18" loext:marker-style-name="T16"><text:span text:style-name="T48">Step 2</text:span><text:span text:style-name="T18">：</text:span><text:span text:style-name="T61">將陣列最後一個元素移到 </text:span><text:span text:style-name="T39">Root </text:span><text:span text:style-name="T61">位置。</text:span></text:p>
        </text:list-item>
        <text:list-item text:style-override="WWNum12">
          <text:p text:style-name="P19" loext:marker-style-name="T16"><text:span text:style-name="T48">Step 3</text:span><text:span text:style-name="T18">：</text:span><text:span text:style-name="T50">與兩個子節點中</text:span><text:span text:style-name="T62">較大的</text:span><text:span text:style-name="T50">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13">
          <text:p text:style-name="P20" loext:marker-style-name="T16"><text:span text:style-name="T48">Step 4</text:span><text:span text:style-name="T18">：重複 </text:span><text:span text:style-name="T48">Step 3</text:span><text:span text:style-name="T18">（</text:span><text:span text:style-name="T48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刪除 </text:span><text:span text:style-name="T53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</text:span><text:span text:style-name="T45">把最後元素 </text:span><text:span text:style-name="T38">50 </text:span><text:span text:style-name="T45">移到 </text:span><text:span text:style-name="T38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42">50 </text:span><text:span text:style-name="T63">的子節點 </text:span><text:span text:style-name="T42">90</text:span><text:span text:style-name="T63">、</text:span><text:span text:style-name="T42">80</text:span><text:span text:style-name="T63">，較大為 </text:span><text:span text:style-name="T42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42">50 </text:span><text:span text:style-name="T63">的子節點 </text:span><text:span text:style-name="T42">70</text:span><text:span text:style-name="T63">、</text:span><text:span text:style-name="T42">60</text:span><text:span text:style-name="T63">，較大為 </text:span><text:span text:style-name="T42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64">時間複雜度：</text:span><text:span text:style-name="T58">O(log n) </text:span><text:span text:style-name="T23">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65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66">A</text:span><text:span text:style-name="T14">：逐個插入法</text:span></text:h>
      <text:p text:style-name="P5" loext:marker-style-name="T67"><text:span text:style-name="T68">從</text:span><text:span text:style-name="T69">空</text:span><text:span text:style-name="T68"> </text:span><text:span text:style-name="T70">Heap</text:span><text:span text:style-name="T71"> </text:span><text:span text:style-name="T68">開始，呼叫 </text:span><text:span text:style-name="T72">n </text:span><text:span text:style-name="T73">次 </text:span><text:span text:style-name="T72">Insert</text:span><text:span text:style-name="T68">，每次 </text:span><text:span text:style-name="T74">O(log n)</text:span><text:span text:style-name="T68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75">總時間：</text:span><text:span text:style-name="T76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66">B</text:span><text:span text:style-name="T14">：</text:span><text:span text:style-name="T15">Bottom-Up Build Heap</text:span><text:span text:style-name="T14">（</text:span><text:span text:style-name="T15">Floyd</text:span><text:span text:style-name="T66"> </text:span><text:span text:style-name="T14">演算法）★考試重點★</text:span></text:h>
      <text:p text:style-name="P5" loext:marker-style-name="T67"><text:span text:style-name="T68">直接</text:span><text:span text:style-name="T77">將 </text:span><text:span text:style-name="T78">n </text:span><text:span text:style-name="T77">個元素放入陣列</text:span><text:span text:style-name="T68">，從</text:span><text:span text:style-name="T69">最後一個非葉節點（</text:span><text:span text:style-name="T79">index = ⌊n/2⌋</text:span><text:span text:style-name="T69">）開始</text:span><text:span text:style-name="T68">，</text:span><text:span text:style-name="T80">由下往上</text:span><text:span text:style-name="T68">逐一執行 </text:span><text:span text:style-name="T71">Heapify</text:span><text:span text:style-name="T68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 loext:marker-style-name="T81"><text:span text:style-name="T81">★ </text:span><text:span text:style-name="T82">為何從 <text:s text:c="2"/>?</text:span><text:span text:style-name="T81"> <text:s/>⌊n/2⌋ </text:span><text:span text:style-name="T82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83">的節點全部都是葉節點</text:span><text:span text:style-name="T75">（</text:span><text:span text:style-name="T84">無子節點</text:span><text:span text:style-name="T75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葉節點本身已滿足 </text:span><text:span text:style-name="T23">Heap Property(</text:span><text:span text:style-name="T76">Heap Property</text:span><text:span text:style-name="T85">就是比較父節點</text:span><text:span text:style-name="T76">vs</text:span><text:span text:style-name="T85">子節點</text:span><text:span text:style-name="T75">；</text:span><text:span text:style-name="T86">葉節點沒有孩子 → 沒有東西可以比較 </text:span><text:span text:style-name="T24">→ 一定合法</text:span><text:span text:style-name="T75">。</text:span><text:span text:style-name="T23">)</text:span><text:span text:style-name="T75">，不需要 </text:span><text:span text:style-name="T23">Heapify</text:span><text:span text:style-name="T75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因此</text:span><text:span text:style-name="T87">只需從 </text:span><text:span text:style-name="T39">index ⌊n/2⌋ </text:span><text:span text:style-name="T87">往 </text:span><text:span text:style-name="T39">index 1 </text:span><text:span text:style-name="T87">逐一執行</text:span><text:span text:style-name="T75">。</text:span></text:p>
          </table:table-cell>
        </table:table-row>
      </table:table>
      <text:p text:style-name="P3"/>
      <text:p text:style-name="P22" loext:marker-style-name="T67"><text:span text:style-name="T88">範例：將 </text:span><text:span text:style-name="T89">[50, 30, 80, 10, 20, 70, 90] </text:span><text:span text:style-name="T88">建成 </text:span><text:span text:style-name="T89">Max Heap <text:s text:c="61"/></text:span></text:p>
      <text:p text:style-name="P22" loext:marker-style-name="T67"><text:span text:style-name="T89"/></text:p>
      <text:p text:style-name="P22" loext:marker-style-name="T67"><text:span text:style-name="T89">(</text:span><text:span text:style-name="T90">index = ⌊n/2⌋為最後一個非葉節點；index &gt; ⌊n/2⌋ 的節點全部都是葉節點</text:span><text:span text:style-name="T89">)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75">初始陣列（</text:span><text:span text:style-name="T23">index </text:span><text:span text:style-name="T75">從 </text:span><text:span text:style-name="T23">1 </text:span><text:span text:style-name="T75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75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75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75">，</text:span><text:span text:style-name="T91">最後非葉節點 </text:span><text:span text:style-name="T9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（</text:span><text:span text:style-name="T93">index 4</text:span><text:span text:style-name="T94">、</text:span><text:span text:style-name="T93">5</text:span><text:span text:style-name="T94">、</text:span><text:span text:style-name="T93">6</text:span><text:span text:style-name="T94">、</text:span><text:span text:style-name="T93">7 </text:span><text:span text:style-name="T94">皆為葉節點</text:span><text:span text:style-name="T75">，不需 </text:span><text:span text:style-name="T23">Heapify</text:span><text:span text:style-name="T75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</text:span><text:span text:style-name="T95"> </text:span><text:span text:style-name="T96">Heapify(3)</text:span><text:span text:style-name="T97">：</text:span><text:span text:style-name="T96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子節點：</text:span><text:span text:style-name="T23">index 6 = 70</text:span><text:span text:style-name="T75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8">Max Heap </text:span><text:span text:style-name="T98">要求父 ≥ 子</text:span><text:span text:style-name="T75">，但 </text:span><text:span text:style-name="T23">80 &lt; 90 → </text:span><text:span text:style-name="T75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與 </text:span><text:span text:style-name="T23">90 </text:span><text:span text:style-name="T75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75">上來了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</text:span><text:span text:style-name="T96"> Heapify(2)</text:span><text:span text:style-name="T97">：</text:span><text:span text:style-name="T96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子節點：</text:span><text:span text:style-name="T23">index 4 = 10</text:span><text:span text:style-name="T75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54">30 ≥ 20 </text:span><text:span text:style-name="T99">且 </text:span><text:span text:style-name="T54">30 ≥ 10 → </text:span><text:span text:style-name="T99">符合 </text:span><text:span text:style-name="T54">Max Heap → </text:span><text:span text:style-name="T99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</text:span><text:span text:style-name="T96">Heapify(1)</text:span><text:span text:style-name="T97">：</text:span><text:span text:style-name="T96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子節點：</text:span><text:span text:style-name="T23">index 2 = 30</text:span><text:span text:style-name="T75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90 &gt; 50 → </text:span><text:span text:style-name="T26">50 </text:span><text:span text:style-name="T100">與 </text:span><text:span text:style-name="T26">9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1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</text:span><text:span text:style-name="T101">50 </text:span><text:span text:style-name="T102">下沉到 </text:span><text:span text:style-name="T101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0">50 </text:span><text:span text:style-name="T86">繼續下沉</text:span><text:span text:style-name="T75">：子節點 </text:span><text:span text:style-name="T23">index 6 = 70</text:span><text:span text:style-name="T75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80 &gt; 50 → </text:span><text:span text:style-name="T26">50 </text:span><text:span text:style-name="T100">與 </text:span><text:span text:style-name="T26">8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2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75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4"/>10 <text:s/>20 70 <text:s/>50 <text:s text:c="3"/>← 50 </text:span><text:span text:style-name="T75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75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75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75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66">★ </text:span><text:span text:style-name="T59">為何 </text:span><text:span text:style-name="T103">Bottom-Up Build Heap</text:span><text:span text:style-name="T104"> =</text:span><text:span text:style-name="T66"> </text:span><text:span text:style-name="T105">O(n)</text:span><text:span text:style-name="T14">？</text:span></text:h>
      <text:p text:style-name="P5" loext:marker-style-name="T67"><text:span text:style-name="T68">關鍵直覺：</text:span><text:span text:style-name="T80">每個節點 </text:span><text:span text:style-name="T106">Heapify </text:span><text:span text:style-name="T80">的代價 </text:span><text:span text:style-name="T106">= </text:span><text:span text:style-name="T80">它在樹中的「高度」</text:span><text:span text:style-name="T68">（</text:span><text:span text:style-name="T107">往下最多能走幾層</text:span><text:span text:style-name="T68">）。</text:span></text:p>
      <text:p text:style-name="P5" loext:marker-style-name="T67"><text:span text:style-name="T108">高度愈低的節點數量愈多，代價愈小；高度愈高的節點數量愈少，代價愈大</text:span><text:span text:style-name="T68">。</text:span><text:span text:style-name="T109">兩者相乘加總後收斂至 </text:span><text:span text:style-name="T74">O(n)</text:span><text:span text:style-name="T68">。</text:span></text:p>
      <text:p text:style-name="P3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9">★ 為何 Build Heap 是 O(n)？</text:p>
            <text:p text:style-name="P9"/>
            <text:p text:style-name="P9">Build Heap 由下往上<text:span text:style-name="T110">對每個非葉節點執行 Heapify</text:span>。</text:p>
            <text:p text:style-name="P9"/>
            <text:p text:style-name="P9">以完全二元樹為例：</text:p>
            <text:p text:style-name="P9"/>
            <text:p text:style-name="P9"><text:span text:style-name="T111">高度0（葉節點）約有 </text:span><text:span text:style-name="T112">n/2</text:span><text:span text:style-name="T111"> 個</text:span>，<text:span text:style-name="T113">每個最多移動 0 步</text:span></text:p>
            <text:p text:style-name="P9"><text:span text:style-name="T111">高度1 約有 </text:span><text:span text:style-name="T112">n/4</text:span><text:span text:style-name="T111"> 個</text:span>，<text:span text:style-name="T113">每個最多移動 1 步</text:span></text:p>
            <text:p text:style-name="P9"><text:span text:style-name="T111">高度2 約有 </text:span><text:span text:style-name="T112">n/8</text:span><text:span text:style-name="T111"> 個</text:span>，<text:span text:style-name="T113">每個最多移動 2 步</text:span></text:p>
            <text:p text:style-name="P9"><text:span text:style-name="T111">高度3 約有 </text:span><text:span text:style-name="T112">n/16</text:span><text:span text:style-name="T111"> 個</text:span>，<text:span text:style-name="T113">每個最多移動 3 步</text:span></text:p>
            <text:p text:style-name="P9">...</text:p>
            <text:p text:style-name="P9"/>
            <text:p text:style-name="P9">因此總成本為：</text:p>
            <text:p text:style-name="P9"/>
            <text:p text:style-name="P9">T(n) ≈ (n/2)×0</text:p>
            <text:p text:style-name="P9"/>
            <text:p text:style-name="P9">* (n/4)×1</text:p>
            <text:p text:style-name="P9">* (n/8)×2</text:p>
            <text:p text:style-name="P9">* (n/16)×3</text:p>
            <text:p text:style-name="P9">* ...</text:p>
            <text:p text:style-name="P9"/>
            <text:p text:style-name="P9">觀察可知：</text:p>
            <text:p text:style-name="P9"/>
            <text:p text:style-name="P23">越往上，Heapify 可能移動的步數增加 1，</text:p>
            <text:p text:style-name="P9"><text:span text:style-name="T114">但節點數量卻減少一半</text:span>。</text:p>
            <text:p text:style-name="P9"/>
            <text:p text:style-name="P9">例如：</text:p>
            <text:p text:style-name="P9"/>
            <text:p text:style-name="P9">高度1： (<text:span text:style-name="T113">n/4</text:span>)×<text:span text:style-name="T111">1</text:span></text:p>
            <text:p text:style-name="P9">高度2： (<text:span text:style-name="T113">n/8</text:span>)×<text:span text:style-name="T111">2</text:span></text:p>
            <text:p text:style-name="P9">高度3： (<text:span text:style-name="T113">n/16</text:span>)×<text:span text:style-name="T111">3</text:span></text:p>
            <text:p text:style-name="P9"/>
            <text:p text:style-name="P9">可以看到<text:span text:style-name="T115">節點數減少的速度比成本增加的速度更快</text:span>。</text:p>
            <text:p text:style-name="P9"/>
            <text:p text:style-name="P9">因此<text:span text:style-name="T116">所有層的成本加總後不會達到 O(n log n)，而是 O(n)</text:span>。</text:p>
            <text:p text:style-name="P9"/>
            <text:p text:style-name="P9">結論：</text:p>
            <text:p text:style-name="P9"/>
            <text:p text:style-name="P9"><text:span text:style-name="T117">葉節點很多，但幾乎不用移動</text:span>；</text:p>
            <text:p text:style-name="P9"><text:span text:style-name="T118">根附近節點雖然較貴，但數量很少</text:span>。</text:p>
            <text:p text:style-name="P9"/>
            <text:p text:style-name="P9"><text:span text:style-name="T116">所以 </text:span><text:span text:style-name="T119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75">白話理解：</text:span><text:span text:style-name="T120">葉節點約佔一半，</text:span><text:span text:style-name="T121">Heapify </text:span><text:span text:style-name="T120">代價為 </text:span><text:span text:style-name="T121">0</text:span><text:span text:style-name="T75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 loext:marker-style-name="T122"><text:span text:style-name="T123">往上每層節點數減半，代價只加 </text:span><text:span text:style-name="T122">1</text:span><text:span text:style-name="T123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124">整體工作量被大量葉節點的「零代價」攤平</text:span><text:span text:style-name="T75">，總代價 ∝ </text:span><text:span text:style-name="T23">n</text:span><text:span text:style-name="T75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125"><text:span text:style-name="T126">逐個 </text:span><text:span text:style-name="T125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75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125"><text:span text:style-name="T125">Bottom-Up Build Heap</text:span><text:span text:style-name="T125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75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67"><text:span text:style-name="T71">Heap Sort </text:span><text:span text:style-name="T68">利用 </text:span><text:span text:style-name="T71">Heap </text:span><text:span text:style-name="T68">結構進行排序，分為兩個階段：</text:span></text:p>
      <text:p text:style-name="P3"/>
      <text:list xml:id="list2020808128" text:style-name="WWNum2">
        <text:list-item>
          <text:p text:style-name="P24" loext:marker-style-name="T67"><text:span text:style-name="T71">Phase 1</text:span><text:span text:style-name="T68">：</text:span><text:span text:style-name="T127">Build Heap</text:span><text:span text:style-name="T71"> — </text:span><text:span text:style-name="T128">將原始陣列建成 </text:span><text:span text:style-name="T129">Max Heap</text:span><text:span text:style-name="T68">，時間 </text:span><text:span text:style-name="T71">O(n)</text:span><text:span text:style-name="T68">。</text:span></text:p>
        </text:list-item>
        <text:list-item>
          <text:p text:style-name="P24" loext:marker-style-name="T67"><text:span text:style-name="T71">Phase 2</text:span><text:span text:style-name="T68">：</text:span><text:span text:style-name="T69">反覆 </text:span><text:span text:style-name="T79">Extract-Max</text:span><text:span text:style-name="T71"> — </text:span><text:span text:style-name="T130">取出 </text:span><text:span text:style-name="T131">Root</text:span><text:span text:style-name="T130">（最大值），放到陣列末端</text:span><text:span text:style-name="T68">，</text:span><text:span text:style-name="T132">再 </text:span><text:span text:style-name="T70">Heapify</text:span><text:span text:style-name="T68">，重複 </text:span><text:span text:style-name="T133">n-1</text:span><text:span text:style-name="T71"> </text:span><text:span text:style-name="T68">次，每次 </text:span><text:span text:style-name="T71">O(</text:span><text:span text:style-name="T106">log n</text:span><text:span text:style-name="T71">)</text:span><text:span text:style-name="T68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75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76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空間複雜度 </text:span><text:span text:style-name="T23">= O(1)</text:span><text:span text:style-name="T75">（</text:span><text:span text:style-name="T23">In-place</text:span><text:span text:style-name="T75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穩定性 </text:span><text:span text:style-name="T23">= </text:span><text:span text:style-name="T75">不穩定（</text:span><text:span text:style-name="T23">Unstable</text:span><text:span text:style-name="T75">）</text:span></text:p>
          </table:table-cell>
        </table:table-row>
      </table:table>
      <text:p text:style-name="P3"/>
      <text:p text:style-name="P5" loext:marker-style-name="T67"><text:span text:style-name="T88">範例：對 </text:span><text:span text:style-name="T89">[4, 2, 7, 1, 5] </text:span><text:span text:style-name="T88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125">Build Max Heap</text:span><text:span text:style-name="T75">：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75">，</text:span><text:span text:style-name="T134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75">：</text:span><text:span text:style-name="T26">2 </text:span><text:span text:style-name="T100">的子節點 </text:span><text:span text:style-name="T26">1, 5</text:span><text:span text:style-name="T75">；</text:span><text:span text:style-name="T76">5 &gt; 2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75">：</text:span><text:span text:style-name="T26">4 </text:span><text:span text:style-name="T100">的子節點 </text:span><text:span text:style-name="T26">5, 7</text:span><text:span text:style-name="T75">；</text:span><text:span text:style-name="T76">7 &gt; 4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75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35">反覆</text:span><text:span text:style-name="T75"> </text:span><text:span text:style-name="T38">Extract-Max</text:span><text:span text:style-name="T75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75">：</text:span><text:span text:style-name="T136">取出 </text:span><text:span text:style-name="T137">Root=7</text:span><text:span text:style-name="T136">，末端 </text:span><text:span text:style-name="T137">2 </text:span><text:span text:style-name="T136">移到 </text:span><text:span text:style-name="T137">Root</text:span><text:span text:style-name="T75">，</text:span><text:span text:style-name="T13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75">：</text:span><text:span text:style-name="T136">取出 </text:span><text:span text:style-name="T137">Root=5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13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75">：</text:span><text:span text:style-name="T136">取出 </text:span><text:span text:style-name="T137">Root=4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139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75">：</text:span><text:span text:style-name="T136">取出 </text:span><text:span text:style-name="T137">Root=2</text:span><text:span text:style-name="T136">，末端 </text:span><text:span text:style-name="T137">1 </text:span><text:span text:style-name="T136">移到 </text:span><text:span text:style-name="T137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60"><text:span text:style-name="T86">最終排序（升冪）：</text:span><text:span text:style-name="T60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67"><text:span text:style-name="T131">Priority Queue</text:span><text:span text:style-name="T130">（優先佇列）</text:span><text:span text:style-name="T68">是</text:span><text:span text:style-name="T107">每次取出「優先值最高」元素的資料結構</text:span><text:span text:style-name="T68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40">Insert</text:span><text:span text:style-name="T27"/></text:p>
            </table:table-cell>
            <table:table-cell table:style-name="表格23.A1" office:value-type="string">
              <text:p text:style-name="P25"><text:span text:style-name="T141">Extract-Max</text:span><text:span text:style-name="T142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126">排序好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126">未排序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76"><text:span text:style-name="T76">O(log n)</text:span><text:span text:style-name="T76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75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75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83">是 </text:span><text:span text:style-name="T38">Priority Queue </text:span><text:span text:style-name="T83">最常見的實作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原因是 </text:span><text:span text:style-name="T76">Insert </text:span><text:span text:style-name="T85">和 </text:span><text:span text:style-name="T76">Extract </text:span><text:span text:style-name="T85">都是 </text:span><text:span text:style-name="T76">O(log n)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是</text:span><text:span text:style-name="T86">三種方案中最均衡的折衷解</text:span><text:span text:style-name="T75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應用場景：印表機緩衝（高優先文件先印）、作業系統 </text:span><text:span text:style-name="T23">CPU </text:span><text:span text:style-name="T75">排程。</text:span></text:p>
          </table:table-cell>
        </table:table-row>
      </table:table>
      <text:p text:style-name="P3"/>
      <text:p text:style-name="P3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126">排序好的</text:span><text:span text:style-name="T75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挪動 </text:span><text:span text:style-name="T23">70, 80 </text:span><text:span text:style-name="T75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8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75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126">未排序的</text:span><text:span text:style-name="T75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掃描</text:span><text:span text:style-name="T23">: 80? 10? 30? 70? 50? <text:s/>→ </text:span><text:span text:style-name="T75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75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放末端，</text:span><text:span text:style-name="T23">Bubble Up </text:span><text:span text:style-name="T75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60">50 </text:span><text:span text:style-name="T86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76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35" office:value-type="string">
            <text:p text:style-name="P9"><text:span text:style-name="T23">Extract-Max</text:span><text:span text:style-name="T75">：</text:span><text:span text:style-name="T84">取出 </text:span><text:span text:style-name="T143">Root=80</text:span><text:span text:style-name="T75">，</text:span><text:span text:style-name="T82">末端</text:span><text:span text:style-name="T144"> </text:span><text:span text:style-name="T145">50 </text:span><text:span text:style-name="T82">補位</text:span><text:span text:style-name="T75">，</text:span><text:span text:style-name="T23">Heapify </text:span><text:span text:style-name="T75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75">取出 </text:span><text:span text:style-name="T23">80 <text:s text:c="5"/>50 </text:span><text:span text:style-name="T75">移到 </text:span><text:span text:style-name="T23">Root <text:s text:c="4"/>Heapify </text:span><text:span text:style-name="T75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76">O(log n)</text:span></text:p>
          </table:table-cell>
        </table:table-row>
      </table:table>
      <text:p text:style-name="P3"/>
      <text:h text:style-name="P26" text:outline-level="1" loext:marker-style-name="T146"><text:span text:style-name="T147">七、</text:span><text:span text:style-name="T146">Interval Heap</text:span><text:span text:style-name="T147">（區間堆積）【</text:span><text:span text:style-name="T146">110</text:span><text:span text:style-name="T147">地</text:span><text:span text:style-name="T146">Q4</text:span><text:span text:style-name="T147">】</text:span></text:h>
      <text:h text:style-name="P27" text:outline-level="2" loext:marker-style-name="T148"><text:span text:style-name="T148">7-1 <text:s/></text:span><text:span text:style-name="T149">問題起源：</text:span><text:span text:style-name="T150">普通 </text:span><text:span text:style-name="T151">Heap</text:span><text:span text:style-name="T148"> </text:span><text:span text:style-name="T152">只能快速取一端</text:span></text:h>
      <text:p text:style-name="P28" loext:marker-style-name="T153"><text:span text:style-name="T154">回顧你已學過的 </text:span><text:span text:style-name="T153">Max Heap</text:span><text:span text:style-name="T154">：</text:span></text:p>
      <text:p text:style-name="P29" loext:marker-style-name="T155"><text:span text:style-name="T155"><text:s text:c="11"/>100 <text:s text:c="6"/>← </text:span><text:span text:style-name="T156">Root</text:span><text:span text:style-name="T155"> = 全域最大值（</text:span><text:span text:style-name="T156">O(1) 取得</text:span><text:span text:style-name="T155">）</text:span></text:p>
      <text:p text:style-name="P30"><text:s text:c="10"/>/ <text:s text:c="3"/>\</text:p>
      <text:p text:style-name="P31" loext:marker-style-name="T155"><text:span text:style-name="T155"><text:s text:c="8"/>90 <text:s text:c="5"/>80</text:span><text:span text:style-name="T155"/></text:p>
      <text:p text:style-name="P31" loext:marker-style-name="T155"><text:span text:style-name="T155"><text:s text:c="7"/>/ <text:s/>\</text:span><text:span text:style-name="T155"/></text:p>
      <text:p text:style-name="P31" loext:marker-style-name="T155"><text:span text:style-name="T155"><text:s text:c="6"/>70 <text:s text:c="2"/>60</text:span><text:span text:style-name="T155"/></text:p>
      <text:p text:style-name="P31"/>
      <text:p text:style-name="P31" loext:marker-style-name="T155"><text:span text:style-name="T155"><text:s text:c="2"/>Find-Max <text:s/>= O(1) <text:s/>直接</text:span><text:span text:style-name="T156">看 Root</text:span></text:p>
      <text:p text:style-name="P32" loext:marker-style-name="T155"><text:span text:style-name="T155"><text:s text:c="2"/></text:span><text:span text:style-name="T157">Find-Min <text:s/>= O(n)</text:span><text:span text:style-name="T155"> <text:s/></text:span><text:span text:style-name="T158">最小值藏在某個葉節點，不知在哪，</text:span><text:span text:style-name="T159">只能全掃</text:span></text:p>
      <text:p text:style-name="P33"/>
      <text:p text:style-name="P28" loext:marker-style-name="T153"><text:span text:style-name="T153">Max Heap </text:span><text:span text:style-name="T154">有一個致命弱點：</text:span></text:p>
      <text:list text:style-name="WWNum14">
        <text:list-item>
          <text:p text:style-name="P34" loext:marker-style-name="T153"><text:span text:style-name="T154">取最大值 → </text:span><text:span text:style-name="T153">O(1)</text:span><text:span text:style-name="T154">，非常快，因為 </text:span><text:span text:style-name="T153">Root </text:span><text:span text:style-name="T154">就是最大值。</text:span></text:p>
        </text:list-item>
        <text:list-item>
          <text:p text:style-name="P34" loext:marker-style-name="T153"><text:span text:style-name="T160">取最小值 → </text:span><text:span text:style-name="T161">O(n)</text:span><text:span text:style-name="T154">，</text:span><text:span text:style-name="T162">非常慢，因為最小值可能藏在任何一個葉節點，沒有規律可循。</text:span></text:p>
        </text:list-item>
      </text:list>
      <text:p text:style-name="P3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3" loext:marker-style-name="T163"><text:span text:style-name="T163">❓ </text:span><text:span text:style-name="T164">想一想：最小值在哪裡？</text:span></text:p>
            <text:p text:style-name="P33" loext:marker-style-name="T165"><text:span text:style-name="T166">以上面的 </text:span><text:span text:style-name="T165">Max Heap </text:span><text:span text:style-name="T166">為例，最小值 </text:span><text:span text:style-name="T165">60 </text:span><text:span text:style-name="T166">藏在葉節點。</text:span></text:p>
            <text:p text:style-name="P35" loext:marker-style-name="T165"><text:span text:style-name="T166">如果樹有 </text:span><text:span text:style-name="T165">n </text:span><text:span text:style-name="T166">個節點，不掃到最後一層根本不知道最小值在哪。</text:span></text:p>
          </table:table-cell>
        </table:table-row>
      </table:table>
      <text:p text:style-name="P36"><text:soft-page-break/></text:p>
      <text:h text:style-name="P27" text:outline-level="2" loext:marker-style-name="T148"><text:span text:style-name="T148">7-2 <text:s/></text:span><text:span text:style-name="T150">現實需求</text:span><text:span text:style-name="T149">：</text:span><text:span text:style-name="T152">兩端都要快</text:span></text:h>
      <text:p text:style-name="P28" loext:marker-style-name="T153"><text:span text:style-name="T154">在</text:span><text:span text:style-name="T167">很多實際應用中</text:span><text:span text:style-name="T154">，我們</text:span><text:span text:style-name="T168">同時需要快速取出最大值和最小值</text:span><text:span text:style-name="T154">：</text:span></text:p>
      <text:p text:style-name="P33"/>
      <text:p text:style-name="P29" loext:marker-style-name="T155"><text:span text:style-name="T155"><text:s text:c="2"/>📈 股票交易系統：</text:span><text:span text:style-name="T155"/></text:p>
      <text:p text:style-name="P31" loext:marker-style-name="T155"><text:span text:style-name="T155"><text:s text:c="7"/>→ 最高價（最大值）O(1) 快速取得</text:span><text:span text:style-name="T155"/></text:p>
      <text:p text:style-name="P31" loext:marker-style-name="T155"><text:span text:style-name="T155"><text:s text:c="7"/>→ 最低價（最小值）O(1) 快速取得</text:span><text:span text:style-name="T155"/></text:p>
      <text:p text:style-name="P31"/>
      <text:p text:style-name="P31" loext:marker-style-name="T155"><text:span text:style-name="T155"><text:s text:c="2"/>🖥️ <text:s/>CPU 排程器（雙優先權模式）：</text:span><text:span text:style-name="T155"/></text:p>
      <text:p text:style-name="P31" loext:marker-style-name="T155"><text:span text:style-name="T155"><text:s text:c="7"/>→ 最高優先權工作 <text:s/>→ 優先執行</text:span><text:span text:style-name="T155"/></text:p>
      <text:p text:style-name="P31" loext:marker-style-name="T155"><text:span text:style-name="T155"><text:s text:c="7"/>→ 最低優先權工作 <text:s/>→ 必要時踢出讓位</text:span><text:span text:style-name="T155"/></text:p>
      <text:p text:style-name="P31"/>
      <text:p text:style-name="P31" loext:marker-style-name="T155"><text:span text:style-name="T155"><text:s text:c="2"/>❌ </text:span><text:span text:style-name="T156">普通 Max Heap</text:span><text:span text:style-name="T155"> 做不到：</text:span><text:span text:style-name="T169">找最小值要</text:span><text:span text:style-name="T159"> O(n)</text:span></text:p>
      <text:p text:style-name="P32" loext:marker-style-name="T155"><text:span text:style-name="T155"><text:s text:c="2"/>❌ </text:span><text:span text:style-name="T156">普通 Min Heap</text:span><text:span text:style-name="T155"> 做不到：</text:span><text:span text:style-name="T169">找最大值要</text:span><text:span text:style-name="T159"> O(n)</text:span></text:p>
      <text:p text:style-name="P33"/>
      <text:p text:style-name="P28" loext:marker-style-name="T153"><text:span text:style-name="T154">這類需求稱為 </text:span><text:span text:style-name="T153">Double-Ended Priority Queue</text:span><text:span text:style-name="T154">（</text:span><text:span text:style-name="T153">DEPQ</text:span><text:span text:style-name="T154">，</text:span><text:span text:style-name="T170">雙端優先佇列</text:span><text:span text:style-name="T154">），</text:span><text:span text:style-name="T162">目標是</text:span><text:span text:style-name="T154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3" loext:marker-style-name="T163"><text:span text:style-name="T163">Extract-Min</text:span><text:span text:style-name="T164">（</text:span><text:span text:style-name="T171">取出最小值</text:span><text:span text:style-name="T164">）</text:span><text:span text:style-name="T163">= </text:span><text:span text:style-name="T172">O(log n)</text:span></text:p>
            <text:p text:style-name="P35" loext:marker-style-name="T163"><text:span text:style-name="T163">Extract-Max</text:span><text:span text:style-name="T164">（</text:span><text:span text:style-name="T171">取出最大值</text:span><text:span text:style-name="T164">）</text:span><text:span text:style-name="T163">= </text:span><text:span text:style-name="T172">O(log n)</text:span></text:p>
          </table:table-cell>
        </table:table-row>
      </table:table>
      <text:p text:style-name="P36"/>
      <text:h text:style-name="P27" text:outline-level="2" loext:marker-style-name="T148"><text:span text:style-name="T148">7-3 <text:s/>Interval Heap </text:span><text:span text:style-name="T149">的核心設計</text:span></text:h>
      <text:p text:style-name="P28" loext:marker-style-name="T153"><text:span text:style-name="T173">Interval Heap </text:span><text:span text:style-name="T174">的靈感</text:span><text:span text:style-name="T154">：</text:span><text:span text:style-name="T162">把 </text:span><text:span text:style-name="T175">Min Heap </text:span><text:span text:style-name="T162">和 </text:span><text:span text:style-name="T175">Max Heap</text:span><text:span text:style-name="T176">「疊」在同一棵樹上</text:span><text:span text:style-name="T154">。</text:span></text:p>
      <text:p text:style-name="P28" loext:marker-style-name="T153"><text:span text:style-name="T177">具體做法：</text:span><text:span text:style-name="T178">每個節點不再存一個值</text:span><text:span text:style-name="T154">，</text:span><text:span text:style-name="T168">改成存一個「區間」</text:span><text:span text:style-name="T179">[min_val, max_val]</text:span><text:span text:style-name="T154">：</text:span></text:p>
      <text:p text:style-name="P29" loext:marker-style-name="T155"><text:span text:style-name="T155"><text:s text:c="2"/></text:span><text:span text:style-name="T180">普通</text:span><text:span text:style-name="T155"> Heap 節點： <text:s text:c="9"/>Interval Heap 節點：</text:span></text:p>
      <text:p text:style-name="P31" loext:marker-style-name="T155"><text:span text:style-name="T155"><text:s text:c="7"/></text:span><text:span text:style-name="T156">80</text:span><text:span text:style-name="T155"> <text:s text:c="23"/></text:span><text:span text:style-name="T156">[20, 80]</text:span></text:p>
      <text:p text:style-name="P30"><text:s text:c="34"/>左值 <text:s/>右值</text:p>
      <text:p text:style-name="P31" loext:marker-style-name="T155"><text:span text:style-name="T155"><text:s text:c="30"/>（小的） <text:s/>（大的）</text:span><text:span text:style-name="T155"/></text:p>
      <text:p text:style-name="P31"/>
      <text:p text:style-name="P32" loext:marker-style-name="T155"><text:span text:style-name="T155"><text:s text:c="2"/>規則：</text:span><text:span text:style-name="T181">每個節點的 左值 ≤ 右值</text:span><text:span text:style-name="T182"> </text:span><text:span text:style-name="T155">（必須成立）</text:span></text:p>
      <text:p text:style-name="P33"/>
      <text:p text:style-name="P28" loext:marker-style-name="T153"><text:span text:style-name="T183">兩個 </text:span><text:span text:style-name="T184">Heap </text:span><text:span text:style-name="T183">的同時維護</text:span><text:span text:style-name="T154">：</text:span></text:p>
      <text:list text:continue-numbering="true" text:style-name="WWNum14">
        <text:list-item>
          <text:p text:style-name="P34" loext:marker-style-name="T153"><text:span text:style-name="T167">所有節點的</text:span><text:span text:style-name="T185">左</text:span><text:span text:style-name="T167">值（</text:span><text:span text:style-name="T186">min </text:span><text:span text:style-name="T167">端）</text:span><text:span text:style-name="T154">— 自上而下形成一個 </text:span><text:span text:style-name="T187">Min Heap</text:span></text:p>
        </text:list-item>
        <text:list-item>
          <text:p text:style-name="P34" loext:marker-style-name="T153"><text:span text:style-name="T167">所有節點的</text:span><text:span text:style-name="T188">右</text:span><text:span text:style-name="T167">值（</text:span><text:span text:style-name="T186">max </text:span><text:span text:style-name="T167">端</text:span><text:span text:style-name="T154">）— 自上而下形成一個 </text:span><text:span text:style-name="T189">Max Heap</text:span></text:p>
        </text:list-item>
      </text:list>
      <text:p text:style-name="P3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3" loext:marker-style-name="T163"><text:span text:style-name="T163">Interval Heap = </text:span><text:span text:style-name="T190">Min Heap</text:span><text:span text:style-name="T191">（左值）</text:span><text:span text:style-name="T163">+</text:span><text:span text:style-name="T189"> Max Heap</text:span><text:span text:style-name="T192">（右值）</text:span><text:span text:style-name="T193">同時疊在一棵樹上</text:span></text:p>
          </table:table-cell>
        </table:table-row>
      </table:table>
      <text:p text:style-name="P36"/>
      <text:h text:style-name="P27" text:outline-level="2" loext:marker-style-name="T148"><text:span text:style-name="T148">7-4 <text:s/></text:span><text:span text:style-name="T149">整棵樹的結構解析</text:span></text:h>
      <text:p text:style-name="P29" loext:marker-style-name="T155"><text:span text:style-name="T155"><text:s text:c="14"/>[</text:span><text:span text:style-name="T180">10</text:span><text:span text:style-name="T155">, </text:span><text:span text:style-name="T194">100</text:span><text:span text:style-name="T155">] <text:s text:c="9"/>← Root</text:span></text:p>
      <text:p text:style-name="P31" loext:marker-style-name="T155"><text:span text:style-name="T155"><text:s text:c="13"/>/ <text:s text:c="9"/>\</text:span><text:span text:style-name="T155"/></text:p>
      <text:p text:style-name="P32" loext:marker-style-name="T155"><text:soft-page-break/><text:span text:style-name="T155"><text:s text:c="8"/>[</text:span><text:span text:style-name="T180">20</text:span><text:span text:style-name="T155">, </text:span><text:span text:style-name="T194">80</text:span><text:span text:style-name="T155">] <text:s text:c="5"/>[</text:span><text:span text:style-name="T180">30</text:span><text:span text:style-name="T155">, </text:span><text:span text:style-name="T194">90</text:span><text:span text:style-name="T155">]</text:span></text:p>
      <text:p text:style-name="P33"/>
      <text:p text:style-name="P28" loext:marker-style-name="T153"><text:span text:style-name="T154">拆開來看左右兩個 </text:span><text:span text:style-name="T153">Heap</text:span><text:span text:style-name="T154">：</text:span></text:p>
      <text:p text:style-name="P29" loext:marker-style-name="T155"><text:span text:style-name="T155"><text:s text:c="2"/></text:span><text:span text:style-name="T195">左值（min 端）形成 Min Heap</text:span><text:span text:style-name="T155">： <text:s text:c="2"/></text:span><text:span text:style-name="T196">右值（max 端）形成 Max Heap</text:span><text:span text:style-name="T155">：</text:span></text:p>
      <text:p text:style-name="P31"/>
      <text:p text:style-name="P31" loext:marker-style-name="T155"><text:span text:style-name="T155"><text:s text:c="10"/>10 <text:s text:c="30"/>100</text:span><text:span text:style-name="T155"/></text:p>
      <text:p text:style-name="P31" loext:marker-style-name="T155"><text:span text:style-name="T155"><text:s text:c="9"/>/ <text:s/>\ <text:s text:c="28"/>/ <text:s text:c="3"/>\</text:span><text:span text:style-name="T155"/></text:p>
      <text:p text:style-name="P31" loext:marker-style-name="T155"><text:span text:style-name="T155"><text:s text:c="8"/>20 <text:s/>30 <text:s text:c="26"/>80 <text:s text:c="4"/>90</text:span><text:span text:style-name="T155"/></text:p>
      <text:p text:style-name="P31"/>
      <text:p text:style-name="P32" loext:marker-style-name="T155"><text:span text:style-name="T155"><text:s text:c="2"/>驗證 Min Heap：10 ≤ 20 ✓ <text:s/>10 ≤ 30 ✓ <text:s text:c="2"/>驗證 Max Heap：100 ≥ 80 ✓ <text:s/>100 ≥ 90 ✓</text:span><text:span text:style-name="T155"/></text:p>
      <text:p text:style-name="P33"/>
      <text:p text:style-name="P28" loext:marker-style-name="T153"><text:span text:style-name="T154">因此：</text:span><text:span text:style-name="T153"/></text:p>
      <text:list text:continue-numbering="true" text:style-name="WWNum14">
        <text:list-item>
          <text:p text:style-name="P34" loext:marker-style-name="T153"><text:span text:style-name="T186">Root </text:span><text:span text:style-name="T167">的</text:span><text:span text:style-name="T185">左</text:span><text:span text:style-name="T167">值</text:span><text:span text:style-name="T154"> </text:span><text:span text:style-name="T153">= </text:span><text:span text:style-name="T197">Min</text:span><text:span text:style-name="T153"> Heap </text:span><text:span text:style-name="T154">的 </text:span><text:span text:style-name="T153">Root = </text:span><text:span text:style-name="T198">全域最小值</text:span><text:span text:style-name="T154"> </text:span><text:span text:style-name="T153">= 10 <text:s/>→ <text:s/>Find-Min = O(1)</text:span></text:p>
        </text:list-item>
        <text:list-item>
          <text:p text:style-name="P34" loext:marker-style-name="T153"><text:span text:style-name="T186">Root </text:span><text:span text:style-name="T167">的</text:span><text:span text:style-name="T188">右</text:span><text:span text:style-name="T167">值</text:span><text:span text:style-name="T154"> </text:span><text:span text:style-name="T153">= </text:span><text:span text:style-name="T199">Max</text:span><text:span text:style-name="T153"> Heap </text:span><text:span text:style-name="T154">的 </text:span><text:span text:style-name="T153">Root = </text:span><text:span text:style-name="T200">全域最大值</text:span><text:span text:style-name="T154"> </text:span><text:span text:style-name="T153">= 100 <text:s/>→ <text:s/>Find-Max = O(1)</text:span></text:p>
        </text:list-item>
      </text:list>
      <text:p text:style-name="P33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3" loext:marker-style-name="T163"><text:span text:style-name="T163">🎯 Interval Heap </text:span><text:span text:style-name="T164">的核心價值</text:span></text:p>
            <text:p text:style-name="P33" loext:marker-style-name="T165"><text:span text:style-name="T201">Root </text:span><text:span text:style-name="T202">節點</text:span><text:span text:style-name="T171">同時持有全域最小值（左值）和全域最大值（右值）</text:span><text:span text:style-name="T166">，</text:span></text:p>
            <text:p text:style-name="P35" loext:marker-style-name="T165"><text:span text:style-name="T203">無論取哪一端</text:span><text:span text:style-name="T166">，</text:span><text:span text:style-name="T162">都能 </text:span><text:span text:style-name="T175">O(1) </text:span><text:span text:style-name="T162">找到、</text:span><text:span text:style-name="T175">O(log n) </text:span><text:span text:style-name="T162">取出。</text:span></text:p>
          </table:table-cell>
        </table:table-row>
      </table:table>
      <text:p text:style-name="P36"/>
      <text:h text:style-name="P6" text:outline-level="2" loext:marker-style-name="T13"><text:span text:style-name="T14">7-4.5 <text:s/></text:span><text:span text:style-name="T204">Find 找到 vs. Extract 取出</text:span><text:span text:style-name="T14">：</text:span><text:span text:style-name="T205">為何一個 O(1)、一個 O(log n)</text:span><text:span text:style-name="T14">？</text:span></text:h>
      <text:p text:style-name="P5" loext:marker-style-name="T206"><text:span text:style-name="T207">這是很多人第一次接觸 Heap 時最容易混淆的地方。關鍵在於：</text:span><text:span text:style-name="T208">「找到（Find/Peek）」和「取出（Extract/Delete）」是完全不同的兩件事。</text:span></text:p>
      <text:p text:style-name="P3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209">先用普通 Max Heap 建立直覺</text:span><text:span text:style-name="T27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 loext:marker-style-name="T22"><text:span text:style-name="T23"><text:s text:c="2"/>→ </text:span><text:span text:style-name="T60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</text:span><text:span text:style-name="T210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</text:span><text:span text:style-name="T211">Heap Property（父 ≥ 子）不能違反</text:span></text:p>
          </table:table-cell>
        </table:table-row>
      </table:table>
      <text:p text:style-name="P36"/>
      <text:p text:style-name="P5" loext:marker-style-name="T206"><text:span text:style-name="T212">「取出」的代價遠比「找到」高，是因為</text:span><text:span text:style-name="T213">刪除 Root 後必須完整修復整棵樹的結構。</text:span><text:span text:style-name="T207">流程如下：</text:span></text:p>
      <text:p text:style-name="P3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37">最壞情況需走完整棵樹的高度 h = log₂n</text:span><text:span text:style-name="T23">，因此 </text:span><text:span text:style-name="T81">O(log n)</text:span><text:span text:style-name="T23">。</text:span></text:p>
          </table:table-cell>
        </table:table-row>
      </table:table>
      <text:p text:style-name="P3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209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</text:span><text:span text:style-name="T26">Extract</text:span><text:span text:style-name="T23"> = </text:span><text:span text:style-name="T214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1"/></text:span><text:span text:style-name="T60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</text:span><text:span text:style-name="T38">這個「整理」的工作量才是 O(log n) 的真正來源。</text:span></text:p>
          </table:table-cell>
        </table:table-row>
      </table:table>
      <text:p text:style-name="P36"/>
      <text:h text:style-name="P6" text:outline-level="2" loext:marker-style-name="T13"><text:span text:style-name="T14">7-4.6 <text:s/>Interval Heap 的 Extract-Min 與 Extract-Max 完整示範</text:span><text:span text:style-name="T13"/></text:h>
      <text:p text:style-name="P5" loext:marker-style-name="T206"><text:span text:style-name="T207">Interval Heap 的 Extract 操作，本質上就是普通 Heap 的 Heapify Down，只是同時維護 Min 端和 Max 端兩條性質。以下用同一棵初始樹，分別展示兩種操作。</text:span><text:span text:style-name="T206"/></text:p>
      <text:p text:style-name="P3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209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36"/>
      <text:h text:style-name="P6" text:outline-level="2" loext:marker-style-name="T13"><text:span text:style-name="T14"><text:s text:c="2"/>一、Extract-Min（</text:span><text:span text:style-name="T215">取出最小值 10</text:span><text:span text:style-name="T14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</text:span><text:span text:style-name="T216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</text:span><text:span text:style-name="T121">30 &gt; 20 → 違反 Min Heap（父 ≤ 子）</text:span><text:span text:style-name="T23">→ </text:span><text:span text:style-name="T93">交換 min 端</text:span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</text:span><text:span text:style-name="T60">Min Heap 與 Max Heap 性質皆完整恢復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二、Extract-Max（</text:span><text:span text:style-name="T215">取出最大值 100</text:span><text:span text:style-name="T14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</text:span><text:span text:style-name="T216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</text:span><text:span text:style-name="T60">結構完整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206"><text:span text:style-name="T207">上例的 Max Heap 恰好不需要下沉。以下補充一個「確實需要多次下沉」的案例，更能體現 O(log n) 的代價：</text:span><text:span text:style-name="T206"/></text:p>
      <text:p text:style-name="P3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3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209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17"><text:s text:c="2"/>Extract-Min <text:s text:c="7"/>O(log n) <text:s text:c="9"/></text:span><text:span text:style-name="T218">O(n) </text:span><text:span text:style-name="T217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17"><text:s text:c="2"/>Extract-Max <text:s text:c="7"/>O(log n) <text:s text:c="9"/>O(log n) <text:s text:c="8"/></text:span><text:span text:style-name="T219">O(n)</text:span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38">Interval Heap 的兩個 Extract 都是 O(log n)</text:span><text:span text:style-name="T23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20">Extract 要 O(log n) </text:span><text:span text:style-name="T23">是因為</text:span><text:span text:style-name="T81">刪除後必須 Heapify Down 修復結構</text:span><text:span text:style-name="T23">。</text:span></text:p>
          </table:table-cell>
        </table:table-row>
      </table:table>
      <text:p text:style-name="P3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</text:span><text:span text:style-name="T76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刪除後最後元素補位，再 Heapify Down 重建性質，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</text:span><text:span text:style-name="T60">Extract = 拿走，要整理 → O(log n)</text:span><text:span text:style-name="T23">。</text:span></text:p>
          </table:table-cell>
        </table:table-row>
      </table:table>
      <text:p text:style-name="P36"/>
      <text:p text:style-name="P36"/>
      <text:h text:style-name="P27" text:outline-level="2" loext:marker-style-name="T148"><text:span text:style-name="T148">7-5 <text:s/></text:span><text:span text:style-name="T149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21"><text:span text:style-name="T222">操作</text:span><text:span text:style-name="T221"/></text:p>
          </table:table-cell>
          <table:table-cell table:style-name="表格39.A1" office:value-type="string">
            <text:p text:style-name="Standard" loext:marker-style-name="T221"><text:span text:style-name="T221">Interval Heap</text:span><text:span text:style-name="T221"/></text:p>
          </table:table-cell>
          <table:table-cell table:style-name="表格39.A1" office:value-type="string">
            <text:p text:style-name="Standard" loext:marker-style-name="T221"><text:span text:style-name="T222">普通 </text:span><text:span text:style-name="T221">Max Heap</text:span></text:p>
          </table:table-cell>
          <table:table-cell table:style-name="表格39.A1" office:value-type="string">
            <text:p text:style-name="Standard" loext:marker-style-name="T221"><text:span text:style-name="T222">普通 </text:span><text:span text:style-name="T221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3"><text:span text:style-name="T223">Find-Min</text:span><text:span text:style-name="T224">（找最小值）</text:span></text:p>
          </table:table-cell>
          <table:table-cell table:style-name="表格39.A2" office:value-type="string">
            <text:p text:style-name="Standard" loext:marker-style-name="T223"><text:span text:style-name="T223">O(1) ★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n)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1)</text:span><text:span text:style-name="T22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3"><text:span text:style-name="T223">Find-Max</text:span><text:span text:style-name="T224">（找最大值）</text:span></text:p>
          </table:table-cell>
          <table:table-cell table:style-name="表格39.A3" office:value-type="string">
            <text:p text:style-name="Standard" loext:marker-style-name="T223"><text:span text:style-name="T223">O(1) ★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1)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n)</text:span><text:span text:style-name="T223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3"><text:span text:style-name="T223">Extract-Min</text:span><text:span text:style-name="T224">（取出最小）</text:span></text:p>
          </table:table-cell>
          <table:table-cell table:style-name="表格39.A2" office:value-type="string">
            <text:p text:style-name="Standard" loext:marker-style-name="T223"><text:span text:style-name="T223">O(log n) ★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n)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3"><text:span text:style-name="T223">Extract-Max</text:span><text:span text:style-name="T224">（取出最大）</text:span></text:p>
          </table:table-cell>
          <table:table-cell table:style-name="表格39.A3" office:value-type="string">
            <text:p text:style-name="Standard" loext:marker-style-name="T223"><text:span text:style-name="T223">O(log n) ★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n)</text:span><text:span text:style-name="T223"/></text:p>
          </table:table-cell>
        </table:table-row>
      </table:table>
      <text:p text:style-name="P28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33" loext:marker-style-name="T163"><text:span text:style-name="T163">⚠️ <text:s/></text:span><text:span text:style-name="T164">普通 </text:span><text:span text:style-name="T163">Min/Max Heap </text:span><text:span text:style-name="T164">各有盲點：</text:span></text:p>
            <text:p text:style-name="P33" loext:marker-style-name="T165"><text:span text:style-name="T160">普通 </text:span><text:span text:style-name="T161">Max Heap </text:span><text:span text:style-name="T160">找最小值 </text:span><text:span text:style-name="T166">→ </text:span><text:span text:style-name="T186">O(n)</text:span><text:span text:style-name="T167">（要掃整棵樹）</text:span></text:p>
            <text:p text:style-name="P33" loext:marker-style-name="T165"><text:span text:style-name="T225">普通 </text:span><text:span text:style-name="T226">Min Heap </text:span><text:span text:style-name="T225">找最大值 </text:span><text:span text:style-name="T166">→ </text:span><text:span text:style-name="T186">O(n)</text:span><text:span text:style-name="T167">（同理）</text:span></text:p>
            <text:p text:style-name="P35" loext:marker-style-name="T165"><text:span text:style-name="T175">Interval Heap </text:span><text:span text:style-name="T162">解決此問題，兩端操作都達到 </text:span><text:span text:style-name="T175">O(log n)</text:span><text:span text:style-name="T166">，這是其最大優勢。</text:span></text:p>
          </table:table-cell>
        </table:table-row>
      </table:table>
      <text:p text:style-name="P36"/>
      <text:h text:style-name="P27" text:outline-level="2" loext:marker-style-name="T148"><text:span text:style-name="T148">7-6 <text:s/>Insert </text:span><text:span text:style-name="T149">操作示範（插入 </text:span><text:span text:style-name="T148">5</text:span><text:span text:style-name="T149">）</text:span></text:h>
      <text:p text:style-name="P28" loext:marker-style-name="T153"><text:span text:style-name="T154">以下示範將數字 </text:span><text:span text:style-name="T153">5 </text:span><text:span text:style-name="T154">插入含 </text:span><text:span text:style-name="T153">{10, 100}, {20, 80}, {30, 90} </text:span><text:span text:style-name="T154">的 </text:span><text:span text:style-name="T153">Interval Heap</text:span><text:span text:style-name="T154">：</text:span></text:p>
      <text:p text:style-name="P29" loext:marker-style-name="T155"><text:span text:style-name="T155">初始： <text:s text:c="10"/>[10, 100]</text:span><text:span text:style-name="T155"/></text:p>
      <text:p text:style-name="P31" loext:marker-style-name="T155"><text:span text:style-name="T155"><text:s text:c="18"/>/ <text:s text:c="7"/>\</text:span><text:span text:style-name="T155"/></text:p>
      <text:p text:style-name="P31" loext:marker-style-name="T155"><text:span text:style-name="T155"><text:s text:c="13"/>[20, 80] <text:s text:c="2"/>[30, 90]</text:span><text:span text:style-name="T155"/></text:p>
      <text:p text:style-name="P31"/>
      <text:p text:style-name="P31" loext:marker-style-name="T155"><text:span text:style-name="T155">Step 1：</text:span><text:span text:style-name="T156">新葉 [5, 5] </text:span><text:span text:style-name="T155">接在 [20, 80] 左子位置</text:span></text:p>
      <text:p text:style-name="P31" loext:marker-style-name="T155"><text:span text:style-name="T155"><text:s text:c="13"/>[10, 100]</text:span><text:span text:style-name="T155"/></text:p>
      <text:p text:style-name="P31" loext:marker-style-name="T155"><text:span text:style-name="T155"><text:s text:c="14"/>/ <text:s text:c="7"/>\</text:span><text:span text:style-name="T155"/></text:p>
      <text:p text:style-name="P31" loext:marker-style-name="T155"><text:span text:style-name="T155"><text:s text:c="9"/>[20, 80] <text:s text:c="2"/>[30, 90]</text:span><text:span text:style-name="T155"/></text:p>
      <text:p text:style-name="P31" loext:marker-style-name="T155"><text:span text:style-name="T155"><text:s text:c="14"/>/</text:span><text:span text:style-name="T155"/></text:p>
      <text:p text:style-name="P31" loext:marker-style-name="T155"><text:span text:style-name="T155"><text:s text:c="11"/>[5, 5] <text:s text:c="2"/>← </text:span><text:span text:style-name="T227">5 &lt; parent.min(20)</text:span><text:span text:style-name="T155">，</text:span><text:span text:style-name="T228">min 端需上浮</text:span></text:p>
      <text:p text:style-name="P31"/>
      <text:p text:style-name="P31" loext:marker-style-name="T155"><text:span text:style-name="T155">Step 2：</text:span><text:span text:style-name="T194">交換 min 端 → [20,80]→[5,80]</text:span><text:span text:style-name="T155">，</text:span><text:span text:style-name="T228">葉→[20,20]</text:span></text:p>
      <text:p text:style-name="P31" loext:marker-style-name="T155"><text:span text:style-name="T155"><text:s text:c="13"/>[10, 100]</text:span><text:span text:style-name="T155"/></text:p>
      <text:p text:style-name="P31" loext:marker-style-name="T155"><text:span text:style-name="T155"><text:s text:c="14"/>/ <text:s text:c="7"/>\</text:span><text:span text:style-name="T155"/></text:p>
      <text:p text:style-name="P31" loext:marker-style-name="T155"><text:span text:style-name="T155"><text:s text:c="10"/>[5, 80] <text:s text:c="2"/>[30, 90] <text:s text:c="2"/>← </text:span><text:span text:style-name="T227">5 &lt; Root.min(10)</text:span><text:span text:style-name="T155">，</text:span><text:span text:style-name="T228">繼續上浮</text:span></text:p>
      <text:p text:style-name="P31" loext:marker-style-name="T155"><text:span text:style-name="T155"><text:s text:c="14"/>/</text:span><text:span text:style-name="T155"/></text:p>
      <text:p text:style-name="P31" loext:marker-style-name="T155"><text:span text:style-name="T155"><text:s text:c="10"/>[20, 20]</text:span><text:span text:style-name="T155"/></text:p>
      <text:p text:style-name="P31"/>
      <text:p text:style-name="P31" loext:marker-style-name="T155"><text:span text:style-name="T155">Step 3：</text:span><text:span text:style-name="T194">交換 min 端 → Root[10,100]→[5,100]</text:span><text:span text:style-name="T155">，</text:span><text:span text:style-name="T228">[5,80]→[10,80]</text:span></text:p>
      <text:p text:style-name="P31"/>
      <text:p text:style-name="P31" loext:marker-style-name="T155"><text:span text:style-name="T155">最終： <text:s text:c="10"/>[5, 100] <text:s text:c="2"/>← </text:span><text:span text:style-name="T229">全域最小值已更新</text:span></text:p>
      <text:p text:style-name="P31" loext:marker-style-name="T155"><text:span text:style-name="T155"><text:s text:c="18"/>/ <text:s text:c="7"/>\</text:span><text:span text:style-name="T155"/></text:p>
      <text:p text:style-name="P31" loext:marker-style-name="T155"><text:span text:style-name="T155"><text:s text:c="13"/>[10, 80] <text:s text:c="2"/>[30, 90]</text:span><text:span text:style-name="T155"/></text:p>
      <text:p text:style-name="P31" loext:marker-style-name="T155"><text:span text:style-name="T155"><text:s text:c="18"/>/</text:span><text:span text:style-name="T155"/></text:p>
      <text:p text:style-name="P32" loext:marker-style-name="T155"><text:span text:style-name="T155"><text:s text:c="13"/>[20, 20]</text:span><text:span text:style-name="T155"/></text:p>
      <text:p text:style-name="P33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3" loext:marker-style-name="T163"><text:span text:style-name="T163">Insert </text:span><text:span text:style-name="T164">規則：</text:span></text:p>
            <text:p text:style-name="P33" loext:marker-style-name="T165"><text:span text:style-name="T166">新值 </text:span><text:span text:style-name="T165">&lt; </text:span><text:span text:style-name="T166">父節點左值（</text:span><text:span text:style-name="T165">min</text:span><text:span text:style-name="T166">）→ 交換左值，繼續往上（</text:span><text:span text:style-name="T165">min </text:span><text:span text:style-name="T166">端上浮）</text:span></text:p>
            <text:p text:style-name="P33" loext:marker-style-name="T165"><text:span text:style-name="T166">新值 </text:span><text:span text:style-name="T165">&gt; </text:span><text:span text:style-name="T166">父節點右值（</text:span><text:span text:style-name="T165">max</text:span><text:span text:style-name="T166">）→ 交換右值，繼續往上（</text:span><text:span text:style-name="T165">max </text:span><text:span text:style-name="T166">端上浮）</text:span></text:p>
            <text:p text:style-name="P35" loext:marker-style-name="T165"><text:span text:style-name="T166">新值介於父節點 </text:span><text:span text:style-name="T165">[min, max] </text:span><text:span text:style-name="T166">之間 → 合法，停止</text:span></text:p>
          </table:table-cell>
        </table:table-row>
      </table:table>
      <text:h text:style-name="P26" text:outline-level="1"><text:span text:style-name="T147">八、合併兩個 </text:span><text:span text:style-name="T146">Heap</text:span><text:span text:style-name="T147">（</text:span><text:span text:style-name="T146">Merge Heap</text:span><text:span text:style-name="T147">）【</text:span><text:span text:style-name="T146">111</text:span><text:span text:style-name="T147">地</text:span><text:span text:style-name="T146">Q4</text:span><text:span text:style-name="T147">】</text:span></text:h>
      <text:h text:style-name="P27" text:outline-level="2" loext:marker-style-name="T148"><text:span text:style-name="T148">8-1 <text:s/></text:span><text:span text:style-name="T149">問題起源：普通 </text:span><text:span text:style-name="T148">Heap </text:span><text:span text:style-name="T149">合併需要 </text:span><text:span text:style-name="T148">O(n+m)</text:span></text:h>
      <text:p text:style-name="P28" loext:marker-style-name="T153"><text:span text:style-name="T154">假設現在有兩個 </text:span><text:span text:style-name="T153">Max Heap A </text:span><text:span text:style-name="T154">和 </text:span><text:span text:style-name="T153">B</text:span><text:span text:style-name="T154">，你想把它們合併成一個新的 </text:span><text:span text:style-name="T153">Max Heap</text:span><text:span text:style-name="T154">：</text:span></text:p>
      <text:p text:style-name="P29" loext:marker-style-name="T155"><text:soft-page-break/><text:span text:style-name="T155"><text:s text:c="2"/>Heap A： <text:s text:c="9"/>Heap B： <text:s text:c="9"/>合併目標：</text:span><text:span text:style-name="T155"/></text:p>
      <text:p text:style-name="P31" loext:marker-style-name="T155"><text:span text:style-name="T155"><text:s text:c="7"/>90 <text:s text:c="15"/>95 <text:s text:c="16"/>95</text:span><text:span text:style-name="T155"/></text:p>
      <text:p text:style-name="P31" loext:marker-style-name="T155"><text:span text:style-name="T155"><text:s text:c="6"/>/ <text:s/>\ <text:s text:c="13"/>/ <text:s/>\ <text:s text:c="14"/>/ <text:s text:c="3"/>\</text:span><text:span text:style-name="T155"/></text:p>
      <text:p text:style-name="P31" loext:marker-style-name="T155"><text:span text:style-name="T155"><text:s text:c="5"/>70 <text:s text:c="2"/>80 <text:s text:c="10"/>60 <text:s text:c="2"/>50 <text:s text:c="10"/>90 <text:s text:c="5"/>80</text:span><text:span text:style-name="T155"/></text:p>
      <text:p text:style-name="P31" loext:marker-style-name="T155"><text:span text:style-name="T155"><text:s text:c="40"/>/ <text:s/>\ <text:s text:c="2"/>/</text:span><text:span text:style-name="T155"/></text:p>
      <text:p text:style-name="P32" loext:marker-style-name="T155"><text:span text:style-name="T155"><text:s text:c="39"/>70 <text:s/>60 50</text:span><text:span text:style-name="T155"/></text:p>
      <text:p text:style-name="P33"/>
      <text:p text:style-name="P28" loext:marker-style-name="T153"><text:span text:style-name="T154">普通 </text:span><text:span text:style-name="T153">Binary Heap </text:span><text:span text:style-name="T154">沒有高效的合併方法，通常只能：</text:span></text:p>
      <text:list text:continue-numbering="true" text:style-name="WWNum14">
        <text:list-item>
          <text:p text:style-name="P34" loext:marker-style-name="T153"><text:span text:style-name="T154">方法：把 </text:span><text:span text:style-name="T153">A </text:span><text:span text:style-name="T154">和 </text:span><text:span text:style-name="T153">B </text:span><text:span text:style-name="T154">的所有元素倒出來，重新執行 </text:span><text:span text:style-name="T153">Bottom-Up Build Heap</text:span><text:span text:style-name="T154">。</text:span></text:p>
        </text:list-item>
        <text:list-item>
          <text:p text:style-name="P34" loext:marker-style-name="T153"><text:span text:style-name="T154">代價：</text:span><text:span text:style-name="T153">O(n+m)</text:span><text:span text:style-name="T154">，</text:span><text:span text:style-name="T153">n </text:span><text:span text:style-name="T154">和 </text:span><text:span text:style-name="T153">m </text:span><text:span text:style-name="T154">是兩個 </text:span><text:span text:style-name="T153">Heap </text:span><text:span text:style-name="T154">的大小。</text:span></text:p>
        </text:list-item>
      </text:list>
      <text:p text:style-name="P33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33" loext:marker-style-name="T163"><text:span text:style-name="T163">❓ O(n+m) </text:span><text:span text:style-name="T164">有什麼問題？</text:span></text:p>
            <text:p text:style-name="P33" loext:marker-style-name="T165"><text:span text:style-name="T166">對單次合併來說 </text:span><text:span text:style-name="T165">O(n+m) </text:span><text:span text:style-name="T166">尚可接受，但有些系統一天要合併幾十萬次：</text:span></text:p>
            <text:p text:style-name="P33" loext:marker-style-name="T165"><text:span text:style-name="T165"><text:s text:c="2"/>• Event-driven Simulation</text:span><text:span text:style-name="T166">（事件驅動模擬）</text:span></text:p>
            <text:p text:style-name="P33" loext:marker-style-name="T165"><text:span text:style-name="T165"><text:s text:c="2"/>• </text:span><text:span text:style-name="T166">作業系統排程器（</text:span><text:span text:style-name="T165">Scheduler</text:span><text:span text:style-name="T166">）</text:span></text:p>
            <text:p text:style-name="P35" loext:marker-style-name="T165"><text:span text:style-name="T165"><text:s text:c="2"/>• </text:span><text:span text:style-name="T166">分散式工作佇列（</text:span><text:span text:style-name="T165">Distributed Job Queue</text:span><text:span text:style-name="T166">）</text:span></text:p>
          </table:table-cell>
        </table:table-row>
      </table:table>
      <text:p text:style-name="P36"/>
      <text:h text:style-name="P27" text:outline-level="2" loext:marker-style-name="T148"><text:span text:style-name="T148">8-2 <text:s/></text:span><text:span text:style-name="T149">解決方案：把右側路徑弄得很短</text:span></text:h>
      <text:p text:style-name="P28" loext:marker-style-name="T153"><text:span text:style-name="T154">發明者的想法很直接：</text:span><text:span text:style-name="T153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3" loext:marker-style-name="T163"><text:span text:style-name="T163">Merge </text:span><text:span text:style-name="T164">只沿右側路徑（</text:span><text:span text:style-name="T163">right path</text:span><text:span text:style-name="T164">）遞迴進行。</text:span></text:p>
            <text:p text:style-name="P33" loext:marker-style-name="T165"><text:span text:style-name="T166">如果右側路徑很短 → </text:span><text:span text:style-name="T165">Merge </text:span><text:span text:style-name="T166">就很快。</text:span></text:p>
            <text:p text:style-name="P35" loext:marker-style-name="T165"><text:span text:style-name="T166">因此：故意把樹弄歪，讓右側路徑保持極短。</text:span><text:span text:style-name="T165"/></text:p>
          </table:table-cell>
        </table:table-row>
      </table:table>
      <text:p text:style-name="P33"/>
      <text:p text:style-name="P29" loext:marker-style-name="T155"><text:span text:style-name="T155"><text:s text:c="2"/>普通 Heap（平衡）： <text:s text:c="11"/>Leftist Heap（故意偏左）：</text:span><text:span text:style-name="T155"/></text:p>
      <text:p text:style-name="P31" loext:marker-style-name="T155"><text:span text:style-name="T155"><text:s text:c="8"/>90 <text:s text:c="29"/>90</text:span><text:span text:style-name="T155"/></text:p>
      <text:p text:style-name="P31" loext:marker-style-name="T155"><text:span text:style-name="T155"><text:s text:c="7"/>/ <text:s/>\ <text:s text:c="27"/>/</text:span><text:span text:style-name="T155"/></text:p>
      <text:p text:style-name="P31" loext:marker-style-name="T155"><text:span text:style-name="T155"><text:s text:c="6"/>80 <text:s text:c="2"/>70 <text:s text:c="24"/>80</text:span><text:span text:style-name="T155"/></text:p>
      <text:p text:style-name="P31" loext:marker-style-name="T155"><text:span text:style-name="T155"><text:s text:c="5"/>/ \ / \ <text:s text:c="24"/>/</text:span><text:span text:style-name="T155"/></text:p>
      <text:p text:style-name="P31" loext:marker-style-name="T155"><text:span text:style-name="T155"><text:s text:c="4"/>60 50 40 30 <text:s text:c="21"/>70</text:span><text:span text:style-name="T155"/></text:p>
      <text:p text:style-name="P31" loext:marker-style-name="T155"><text:span text:style-name="T155"><text:s text:c="36"/>/</text:span><text:span text:style-name="T155"/></text:p>
      <text:p text:style-name="P31" loext:marker-style-name="T155"><text:span text:style-name="T155"><text:s text:c="35"/>60</text:span><text:span text:style-name="T155"/></text:p>
      <text:p text:style-name="P31"/>
      <text:p text:style-name="P32" loext:marker-style-name="T155"><text:span text:style-name="T155"><text:s text:c="2"/>左右差不多，Merge 要走很深 <text:s text:c="5"/>右側路徑只有 1 步！Merge 超快</text:span><text:span text:style-name="T155"/></text:p>
      <text:p text:style-name="P36"/>
      <text:h text:style-name="P27" text:outline-level="2"><text:span text:style-name="T148">8-3 <text:s/>NPL</text:span><text:span text:style-name="T149">（</text:span><text:span text:style-name="T148">Null Path Length</text:span><text:span text:style-name="T149">，空路徑長度）</text:span></text:h>
      <text:p text:style-name="P28" loext:marker-style-name="T153"><text:span text:style-name="T153">NPL </text:span><text:span text:style-name="T154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33" loext:marker-style-name="T163"><text:span text:style-name="T163">NPL(node) = </text:span><text:span text:style-name="T164">從該節點出發，走到最近的空節點（</text:span><text:span text:style-name="T163">null</text:span><text:span text:style-name="T164">）所需的步數</text:span></text:p>
            <text:p text:style-name="P35" loext:marker-style-name="T165"><text:span text:style-name="T165">NPL(null) = -1 <text:s/></text:span><text:span text:style-name="T166">（空節點本身的定義）</text:span></text:p>
          </table:table-cell>
        </table:table-row>
      </table:table>
      <text:p text:style-name="P33"><text:soft-page-break/></text:p>
      <text:p text:style-name="P28" loext:marker-style-name="T153"><text:span text:style-name="T154">公式：</text:span><text:span text:style-name="T153">NPL(node) = 1 + min( NPL(</text:span><text:span text:style-name="T154">左子</text:span><text:span text:style-name="T153">), NPL(</text:span><text:span text:style-name="T154">右子</text:span><text:span text:style-name="T153">) )</text:span></text:p>
      <text:p text:style-name="P33"/>
      <text:p text:style-name="P38" loext:marker-style-name="T230"><text:span text:style-name="T230">NPL </text:span><text:span text:style-name="T231">計算範例</text:span></text:p>
      <text:p text:style-name="P29" loext:marker-style-name="T155"><text:span text:style-name="T155"><text:s text:c="14"/>3 <text:s text:c="11"/>← 算 NPL</text:span><text:span text:style-name="T155"/></text:p>
      <text:p text:style-name="P31" loext:marker-style-name="T155"><text:span text:style-name="T155"><text:s text:c="13"/>/ \</text:span><text:span text:style-name="T155"/></text:p>
      <text:p text:style-name="P31" loext:marker-style-name="T155"><text:span text:style-name="T155"><text:s text:c="12"/>5 <text:s text:c="2"/>8</text:span><text:span text:style-name="T155"/></text:p>
      <text:p text:style-name="P31" loext:marker-style-name="T155"><text:span text:style-name="T155"><text:s text:c="11"/>/ \</text:span><text:span text:style-name="T155"/></text:p>
      <text:p text:style-name="P31" loext:marker-style-name="T155"><text:span text:style-name="T155"><text:s text:c="10"/>9 <text:s text:c="2"/>7</text:span><text:span text:style-name="T155"/></text:p>
      <text:p text:style-name="P31"/>
      <text:p text:style-name="P31" loext:marker-style-name="T155"><text:span text:style-name="T155"><text:s text:c="2"/>計算（由葉往根）：</text:span><text:span text:style-name="T155"/></text:p>
      <text:p text:style-name="P31" loext:marker-style-name="T155"><text:span text:style-name="T155"><text:s text:c="4"/>NPL(9) = 1 + min(-1,-1) = 0 <text:s text:c="2"/>（葉節點，兩側皆空）</text:span><text:span text:style-name="T155"/></text:p>
      <text:p text:style-name="P31" loext:marker-style-name="T155"><text:span text:style-name="T155"><text:s text:c="4"/>NPL(7) = 0 <text:s text:c="20"/>（同上）</text:span><text:span text:style-name="T155"/></text:p>
      <text:p text:style-name="P31" loext:marker-style-name="T155"><text:span text:style-name="T155"><text:s text:c="4"/>NPL(8) = 0 <text:s text:c="20"/>（葉節點）</text:span><text:span text:style-name="T155"/></text:p>
      <text:p text:style-name="P31" loext:marker-style-name="T155"><text:span text:style-name="T155"><text:s text:c="4"/>NPL(5) = 1 + min(NPL(9),NPL(7)) = 1+min(0,0) = 1</text:span><text:span text:style-name="T155"/></text:p>
      <text:p text:style-name="P32" loext:marker-style-name="T155"><text:span text:style-name="T155"><text:s text:c="4"/>NPL(3) = 1 + min(NPL(5),NPL(8)) = 1+min(1,0) = 1</text:span><text:span text:style-name="T155"/></text:p>
      <text:p text:style-name="P36"/>
      <text:h text:style-name="P27" text:outline-level="2" loext:marker-style-name="T148"><text:span text:style-name="T148">8-4 <text:s/></text:span><text:span text:style-name="T149">左偏性質（</text:span><text:span text:style-name="T148">Leftist Property</text:span><text:span text:style-name="T149">）</text:span></text:h>
      <text:p text:style-name="P28" loext:marker-style-name="T153"><text:span text:style-name="T153">Leftist Heap </text:span><text:span text:style-name="T154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33" loext:marker-style-name="T163"><text:span text:style-name="T164">每個節點：</text:span><text:span text:style-name="T163">NPL</text:span><text:span text:style-name="T164">（左子樹）≥ </text:span><text:span text:style-name="T163">NPL</text:span><text:span text:style-name="T164">（右子樹）</text:span></text:p>
            <text:p text:style-name="P35" loext:marker-style-name="T165"><text:span text:style-name="T166">意思：左邊一定比右邊「深」或「一樣深」→ 右側路徑一定是最短路徑。</text:span><text:span text:style-name="T165"/></text:p>
          </table:table-cell>
        </table:table-row>
      </table:table>
      <text:p text:style-name="P33"/>
      <text:p text:style-name="P28" loext:marker-style-name="T153"><text:span text:style-name="T154">這個規定保證了：</text:span><text:span text:style-name="T153"/></text:p>
      <text:list text:continue-numbering="true" text:style-name="WWNum14">
        <text:list-item>
          <text:p text:style-name="P34" loext:marker-style-name="T153"><text:span text:style-name="T154">右側路徑長度 ≤ </text:span><text:span text:style-name="T153">log(n+1) <text:s/></text:span><text:span text:style-name="T154">（即使整棵樹有 </text:span><text:span text:style-name="T153">n </text:span><text:span text:style-name="T154">個節點，右路徑也不超過 </text:span><text:span text:style-name="T153">log n </text:span><text:span text:style-name="T154">步）</text:span></text:p>
        </text:list-item>
        <text:list-item>
          <text:p text:style-name="P34" loext:marker-style-name="T153"><text:span text:style-name="T153">Merge </text:span><text:span text:style-name="T154">沿右路徑進行 → 深度 ≤ </text:span><text:span text:style-name="T153">log n → </text:span><text:span text:style-name="T154">時間 </text:span><text:span text:style-name="T153">O(log n)</text:span></text:p>
        </text:list-item>
      </text:list>
      <text:p text:style-name="P33"/>
      <text:p text:style-name="P38" loext:marker-style-name="T230"><text:span text:style-name="T231">上面範例的左偏驗證</text:span><text:span text:style-name="T230"/></text:p>
      <text:p text:style-name="P29" loext:marker-style-name="T155"><text:span text:style-name="T155"><text:s text:c="2"/>節點 3：NPL(左=5) = 1 <text:s/>≥ <text:s/>NPL(右=8) = 0 <text:s text:c="2"/>✓ 左偏</text:span><text:span text:style-name="T155"/></text:p>
      <text:p text:style-name="P31" loext:marker-style-name="T155"><text:span text:style-name="T155"><text:s text:c="2"/>節點 5：NPL(左=9) = 0 <text:s/>≥ <text:s/>NPL(右=7) = 0 <text:s text:c="2"/>✓ 左偏（相等也算）</text:span><text:span text:style-name="T155"/></text:p>
      <text:p text:style-name="P31"/>
      <text:p text:style-name="P32" loext:marker-style-name="T155"><text:span text:style-name="T155">→ 此樹是合法的 Min Leftist Heap ✓</text:span><text:span text:style-name="T155"/></text:p>
      <text:p text:style-name="P36"/>
      <text:h text:style-name="P27" text:outline-level="2"><text:span text:style-name="T148">8-5 <text:s/>Merge </text:span><text:span text:style-name="T149">演算法（以 </text:span><text:span text:style-name="T148">Min Leftist Heap </text:span><text:span text:style-name="T149">為例）</text:span></text:h>
      <text:p text:style-name="P28" loext:marker-style-name="T153"><text:span text:style-name="T154">只有四個步驟，每次都沿右側路徑遞迴：</text:span><text:span text:style-name="T153"/></text:p>
      <text:p text:style-name="P29" loext:marker-style-name="T155"><text:span text:style-name="T155"><text:s text:c="2"/>Step 1：比較 A 和 B 的 Root</text:span><text:span text:style-name="T155"/></text:p>
      <text:p text:style-name="P31" loext:marker-style-name="T155"><text:span text:style-name="T155"><text:s text:c="11"/>→ 較小的 Root 成為新 Root（Min Heap）</text:span><text:span text:style-name="T155"/></text:p>
      <text:p text:style-name="P31" loext:marker-style-name="T155"><text:span text:style-name="T155"><text:s text:c="11"/>→ 較大的 Root 成為另一個子樹（稱為 b）</text:span><text:span text:style-name="T155"/></text:p>
      <text:p text:style-name="P31"/>
      <text:p text:style-name="P31" loext:marker-style-name="T155"><text:span text:style-name="T155"><text:s text:c="2"/>Step 2：遞迴合併「新 Root 的右子樹」與「b」</text:span><text:span text:style-name="T155"/></text:p>
      <text:p text:style-name="P31" loext:marker-style-name="T155"><text:span text:style-name="T155"><text:s text:c="11"/>→ Merge(newRoot.right, b)</text:span><text:span text:style-name="T155"/></text:p>
      <text:p text:style-name="P31"/>
      <text:p text:style-name="P31" loext:marker-style-name="T155"><text:soft-page-break/><text:span text:style-name="T155"><text:s text:c="2"/>Step 3：合併完後，若 NPL(右子樹) &gt; NPL(左子樹)</text:span><text:span text:style-name="T155"/></text:p>
      <text:p text:style-name="P31" loext:marker-style-name="T155"><text:span text:style-name="T155"><text:s text:c="11"/>→ 交換左右子樹，恢復左偏性質</text:span><text:span text:style-name="T155"/></text:p>
      <text:p text:style-name="P31"/>
      <text:p text:style-name="P32" loext:marker-style-name="T155"><text:span text:style-name="T155"><text:s text:c="2"/>Step 4：更新 NPL 值</text:span><text:span text:style-name="T155"/></text:p>
      <text:p text:style-name="P33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33" loext:marker-style-name="T163"><text:span text:style-name="T164">為什麼只走右側路徑？</text:span><text:span text:style-name="T163"/></text:p>
            <text:p text:style-name="P33" loext:marker-style-name="T165"><text:span text:style-name="T165">Merge </text:span><text:span text:style-name="T166">每次遞迴都只取「右子樹」→ 路徑深度 </text:span><text:span text:style-name="T165">= </text:span><text:span text:style-name="T166">右側路徑長度 ≤ </text:span><text:span text:style-name="T165">log n</text:span><text:span text:style-name="T166">。</text:span></text:p>
            <text:p text:style-name="P35" loext:marker-style-name="T165"><text:span text:style-name="T166">左側路徑完全不碰，保持不變。</text:span><text:span text:style-name="T165"/></text:p>
          </table:table-cell>
        </table:table-row>
      </table:table>
      <text:p text:style-name="P36"/>
      <text:h text:style-name="P27" text:outline-level="2" loext:marker-style-name="T148"><text:span text:style-name="T148">8-6 <text:s/>Merge </text:span><text:span text:style-name="T149">完整範例</text:span></text:h>
      <text:p text:style-name="P29" loext:marker-style-name="T155"><text:span text:style-name="T155"><text:s text:c="2"/>Heap A（NPL=1）： <text:s text:c="5"/>Heap B（NPL=1）：</text:span><text:span text:style-name="T155"/></text:p>
      <text:p text:style-name="P31" loext:marker-style-name="T155"><text:span text:style-name="T155"><text:s text:c="10"/>3 <text:s text:c="21"/>6</text:span><text:span text:style-name="T155"/></text:p>
      <text:p text:style-name="P31" loext:marker-style-name="T155"><text:span text:style-name="T155"><text:s text:c="9"/>/ \ <text:s text:c="18"/>/ \</text:span><text:span text:style-name="T155"/></text:p>
      <text:p text:style-name="P31" loext:marker-style-name="T155"><text:span text:style-name="T155"><text:s text:c="8"/>5 <text:s text:c="2"/>8 <text:s text:c="15"/>12 <text:s text:c="2"/>7</text:span><text:span text:style-name="T155"/></text:p>
      <text:p text:style-name="P31"/>
      <text:p text:style-name="P31" loext:marker-style-name="T155"><text:span text:style-name="T155"><text:s text:c="2"/>Step 1：3 &lt; 6 → 3 為新 Root，遞迴 Merge(A.right=8, B=6)</text:span><text:span text:style-name="T155"/></text:p>
      <text:p text:style-name="P31"/>
      <text:p text:style-name="P31" loext:marker-style-name="T155"><text:span text:style-name="T155"><text:s text:c="2"/>Step 2：Merge(8, 6)：6 &lt; 8 → 6 為新 Root，遞迴 Merge(B.right=7, 8)</text:span><text:span text:style-name="T155"/></text:p>
      <text:p text:style-name="P31"/>
      <text:p text:style-name="P31" loext:marker-style-name="T155"><text:span text:style-name="T155"><text:s text:c="2"/>Step 3：Merge(7, 8)：7 &lt; 8 → 7 為新 Root</text:span><text:span text:style-name="T155"/></text:p>
      <text:p text:style-name="P31" loext:marker-style-name="T155"><text:span text:style-name="T155"><text:s text:c="11"/>Merge(null, 8) = 8 <text:s/>→ <text:s/>7.right = 8</text:span><text:span text:style-name="T155"/></text:p>
      <text:p text:style-name="P31" loext:marker-style-name="T155"><text:span text:style-name="T155"><text:s text:c="11"/>NPL(7.left=null)=-1 &lt; NPL(7.right=8)=0 <text:s/>→ <text:s/>交換左右！</text:span><text:span text:style-name="T155"/></text:p>
      <text:p text:style-name="P31" loext:marker-style-name="T155"><text:span text:style-name="T155"><text:s text:c="11"/>結果：7.left=8, 7.right=null, NPL(7)=0</text:span><text:span text:style-name="T155"/></text:p>
      <text:p text:style-name="P31" loext:marker-style-name="T155"><text:span text:style-name="T155"><text:s text:c="20"/>7</text:span><text:span text:style-name="T155"/></text:p>
      <text:p text:style-name="P31" loext:marker-style-name="T155"><text:span text:style-name="T155"><text:s text:c="19"/>/</text:span><text:span text:style-name="T155"/></text:p>
      <text:p text:style-name="P31" loext:marker-style-name="T155"><text:span text:style-name="T155"><text:s text:c="18"/>8</text:span><text:span text:style-name="T155"/></text:p>
      <text:p text:style-name="P31"/>
      <text:p text:style-name="P31" loext:marker-style-name="T155"><text:span text:style-name="T155"><text:s text:c="2"/>Step 4：回填 Merge(8,6)：6.left=12, 6.right=7</text:span><text:span text:style-name="T155"/></text:p>
      <text:p text:style-name="P31" loext:marker-style-name="T155"><text:span text:style-name="T155"><text:s text:c="11"/>NPL(12)=0 = NPL(7)=0 <text:s/>→ <text:s/>不需交換</text:span><text:span text:style-name="T155"/></text:p>
      <text:p text:style-name="P31" loext:marker-style-name="T155"><text:span text:style-name="T155"><text:s text:c="11"/>NPL(6) = min(0,0)+1 = 1</text:span><text:span text:style-name="T155"/></text:p>
      <text:p text:style-name="P31" loext:marker-style-name="T155"><text:span text:style-name="T155"><text:s text:c="20"/>6 <text:s/>[NPL=1]</text:span><text:span text:style-name="T155"/></text:p>
      <text:p text:style-name="P31" loext:marker-style-name="T155"><text:span text:style-name="T155"><text:s text:c="19"/>/ \</text:span><text:span text:style-name="T155"/></text:p>
      <text:p text:style-name="P31" loext:marker-style-name="T155"><text:span text:style-name="T155"><text:s text:c="17"/>12 <text:s text:c="2"/>7</text:span><text:span text:style-name="T155"/></text:p>
      <text:p text:style-name="P31" loext:marker-style-name="T155"><text:span text:style-name="T155"><text:s text:c="21"/>/</text:span><text:span text:style-name="T155"/></text:p>
      <text:p text:style-name="P31" loext:marker-style-name="T155"><text:span text:style-name="T155"><text:s text:c="20"/>8</text:span><text:span text:style-name="T155"/></text:p>
      <text:p text:style-name="P31"/>
      <text:p text:style-name="P31" loext:marker-style-name="T155"><text:span text:style-name="T155"><text:s text:c="2"/>Step 5：回填 Merge(A,B)：3.left=5, 3.right=6</text:span><text:span text:style-name="T155"/></text:p>
      <text:p text:style-name="P31" loext:marker-style-name="T155"><text:span text:style-name="T155"><text:s text:c="11"/>NPL(3.right=6)=1 &gt; NPL(3.left=5)=0 <text:s/>→ <text:s/>交換左右！</text:span><text:span text:style-name="T155"/></text:p>
      <text:p text:style-name="P32" loext:marker-style-name="T155"><text:span text:style-name="T155"><text:s text:c="11"/>NPL(3) = min(NPL(6),NPL(5))+1 = min(1,0)+1 = 1</text:span><text:span text:style-name="T155"/></text:p>
      <text:p text:style-name="P39"/>
      <text:p text:style-name="P40"><text:s text:c="2"/>最終合併結果（Min Leftist Heap）：</text:p>
      <text:p text:style-name="P31"/>
      <text:p text:style-name="P31" loext:marker-style-name="T155"><text:span text:style-name="T155"><text:s text:c="14"/>3 <text:s/>[NPL=1]</text:span><text:span text:style-name="T155"/></text:p>
      <text:p text:style-name="P31" loext:marker-style-name="T155"><text:span text:style-name="T155"><text:s text:c="13"/>/ \</text:span><text:span text:style-name="T155"/></text:p>
      <text:p text:style-name="P31" loext:marker-style-name="T155"><text:span text:style-name="T155"><text:s text:c="12"/>6 <text:s text:c="2"/>5 <text:s/>[NPL=0]</text:span><text:span text:style-name="T155"/></text:p>
      <text:p text:style-name="P31" loext:marker-style-name="T155"><text:span text:style-name="T155"><text:s text:c="11"/>/ \</text:span><text:span text:style-name="T155"/></text:p>
      <text:p text:style-name="P31" loext:marker-style-name="T155"><text:span text:style-name="T155"><text:s text:c="9"/>12 <text:s text:c="2"/>7 <text:s/>[NPL=0]</text:span><text:span text:style-name="T155"/></text:p>
      <text:p text:style-name="P31" loext:marker-style-name="T155"><text:span text:style-name="T155"><text:s text:c="13"/>/</text:span><text:span text:style-name="T155"/></text:p>
      <text:p text:style-name="P31" loext:marker-style-name="T155"><text:span text:style-name="T155"><text:s text:c="12"/>8</text:span><text:span text:style-name="T155"/></text:p>
      <text:p text:style-name="P31"/>
      <text:p text:style-name="P31" loext:marker-style-name="T155"><text:span text:style-name="T155"><text:s text:c="2"/>驗證 Min Heap：3&lt;6 ✓ <text:s/>3&lt;5 ✓ <text:s/>6&lt;12 ✓ <text:s/>6&lt;7 ✓ <text:s/>7&lt;8 ✓</text:span><text:span text:style-name="T155"/></text:p>
      <text:p text:style-name="P32" loext:marker-style-name="T155"><text:soft-page-break/><text:span text:style-name="T155"><text:s text:c="2"/>驗證左偏性：NPL(6)=1 ≥ NPL(5)=0 ✓ <text:s/>NPL(12)=0 ≥ NPL(7)=0 ✓</text:span><text:span text:style-name="T155"/></text:p>
      <text:p text:style-name="P36"/>
      <text:h text:style-name="P27" text:outline-level="2" loext:marker-style-name="T148"><text:span text:style-name="T148">8-7 <text:s/></text:span><text:span text:style-name="T149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21"><text:span text:style-name="T222">操作</text:span><text:span text:style-name="T221"/></text:p>
          </table:table-cell>
          <table:table-cell table:style-name="表格47.A1" office:value-type="string">
            <text:p text:style-name="Standard" loext:marker-style-name="T221"><text:span text:style-name="T222">普通 </text:span><text:span text:style-name="T221">Binary Heap</text:span></text:p>
          </table:table-cell>
          <table:table-cell table:style-name="表格47.A1" office:value-type="string">
            <text:p text:style-name="Standard" loext:marker-style-name="T221"><text:span text:style-name="T221">Leftist Heap</text:span><text:span text:style-name="T22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3"><text:span text:style-name="T223">Insert</text:span><text:span text:style-name="T223"/></text:p>
          </table:table-cell>
          <table:table-cell table:style-name="表格47.A2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47.A2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3"><text:span text:style-name="T223">Extract-Min/Max</text:span><text:span text:style-name="T223"/></text:p>
          </table:table-cell>
          <table:table-cell table:style-name="表格47.A3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47.A3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3"><text:span text:style-name="T223">Merge</text:span><text:span text:style-name="T224">（合併兩個 </text:span><text:span text:style-name="T223">Heap</text:span><text:span text:style-name="T224">）</text:span></text:p>
          </table:table-cell>
          <table:table-cell table:style-name="表格47.A2" office:value-type="string">
            <text:p text:style-name="Standard" loext:marker-style-name="T223"><text:span text:style-name="T223">O(n+m) </text:span><text:span text:style-name="T224">重建</text:span></text:p>
          </table:table-cell>
          <table:table-cell table:style-name="表格47.A2" office:value-type="string">
            <text:p text:style-name="Standard" loext:marker-style-name="T223"><text:span text:style-name="T223">O(log n + log m) ★</text:span><text:span text:style-name="T223"/></text:p>
          </table:table-cell>
        </table:table-row>
      </table:table>
      <text:p text:style-name="P2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3" loext:marker-style-name="T163"><text:span text:style-name="T163">⚠️ <text:s/></text:span><text:span text:style-name="T164">重要：</text:span><text:span text:style-name="T163">Min vs. Max Leftist Heap</text:span></text:p>
            <text:p text:style-name="P33" loext:marker-style-name="T165"><text:span text:style-name="T165">Min Leftist Heap → Merge </text:span><text:span text:style-name="T166">時，較小的 </text:span><text:span text:style-name="T165">Root </text:span><text:span text:style-name="T166">成為新 </text:span><text:span text:style-name="T165">Root</text:span></text:p>
            <text:p text:style-name="P33" loext:marker-style-name="T165"><text:span text:style-name="T165">Max Leftist Heap → Merge </text:span><text:span text:style-name="T166">時，較大的 </text:span><text:span text:style-name="T165">Root </text:span><text:span text:style-name="T166">成為新 </text:span><text:span text:style-name="T165">Root</text:span></text:p>
            <text:p text:style-name="P35" loext:marker-style-name="T165"><text:span text:style-name="T166">演算法步驟完全相同，只有「誰當新 </text:span><text:span text:style-name="T165">Root</text:span><text:span text:style-name="T166">」的比較方向相反。</text:span></text:p>
          </table:table-cell>
        </table:table-row>
      </table:table>
      <text:h text:style-name="P41" text:outline-level="1" loext:marker-style-name="T146"/>
      <text:p text:style-name="P3"/>
      <text:h text:style-name="P4" text:outline-level="1" loext:marker-style-name="T7"><text:span text:style-name="T8">九、</text:span><text:span text:style-name="T9">Heap</text:span><text:span text:style-name="T65"> vs. </text:span><text:span text:style-name="T9">BST / AVL / Red-Black Tree</text:span><text:span text:style-name="T65"> </text:span><text:span text:style-name="T8">深度比較</text:span></text:h>
      <text:p text:style-name="P5" loext:marker-style-name="T67"><text:span text:style-name="T68">這是許多考生最容易混淆的地方，必須徹底釐清各資料結構的設計目的。</text:span><text:span text:style-name="T67"/></text:p>
      <text:p text:style-name="P3"/>
      <text:h text:style-name="P6" text:outline-level="2" loext:marker-style-name="T13"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75">左 </text:span><text:span text:style-name="T23">&lt; </text:span><text:span text:style-name="T75">根 </text:span><text:span text:style-name="T23">&lt; </text:span><text:span text:style-name="T75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穩定搜尋</text:span></text:p>
          </table:table-cell>
          <table:table-cell table:style-name="表格49.A2" office:value-type="string">
            <text:p text:style-name="P10" loext:marker-style-name="T22"><text:span text:style-name="T75">高度差 ≤ </text:span><text:span text:style-name="T23">1</text:span><text:span text:style-name="T75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減少旋轉</text:span></text:p>
          </table:table-cell>
          <table:table-cell table:style-name="表格49.A2" office:value-type="string">
            <text:p text:style-name="P10" loext:marker-style-name="T22"><text:span text:style-name="T75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取最大</text:span><text:span text:style-name="T23">/</text:span><text:span text:style-name="T75">最小值</text:span></text:p>
          </table:table-cell>
          <table:table-cell table:style-name="表格49.A2" office:value-type="string">
            <text:p text:style-name="P10" loext:marker-style-name="T22"><text:span text:style-name="T75">父 ≥ 子（</text:span><text:span text:style-name="T23">Max</text:span><text:span text:style-name="T75">）或父 ≤ 子（</text:span><text:span text:style-name="T23">Min</text:span><text:span text:style-name="T75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10" loext:marker-style-name="T27"><text:span text:style-name="T140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209">BST</text:span><text:span text:style-name="T140">（平衡）</text:span><text:span text:style-name="T209">/ AVL / RB</text:span></text:p>
            </table:table-cell>
            <table:table-cell table:style-name="表格50.A1" office:value-type="string">
              <text:p text:style-name="P10" loext:marker-style-name="T27"><text:span text:style-name="T209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40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75">找最大值（</text:span><text:span text:style-name="T23">view</text:span><text:span text:style-name="T75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75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75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75">找 </text:span><text:span text:style-name="T23">+ O(log n) </text:span><text:span text:style-name="T75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75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「</text:span><text:span text:style-name="T23">Max Heap </text:span><text:span text:style-name="T75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75">錯誤答案：</text:span><text:span text:style-name="T23">O(log n) <text:s/>← </text:span><text:span text:style-name="T75">看到樹就聯想 </text:span><text:span text:style-name="T23">log n </text:span><text:span text:style-name="T75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75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原因：</text:span><text:span text:style-name="T23">Heap </text:span><text:span text:style-name="T75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75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66"> </text:span><text:span text:style-name="T14">選擇 </text:span><text:span text:style-name="T15">Red-Black Tree</text:span><text:span text:style-name="T66"> </text:span><text:span text:style-name="T14">而非 </text:span><text:span text:style-name="T15">AVL</text:span><text:span text:style-name="T14">？</text:span></text:h>
      <text:list text:continue-list="list2020808128" text:style-name="WWNum2">
        <text:list-item>
          <text:p text:style-name="P24" loext:marker-style-name="T67"><text:span text:style-name="T71">AVL</text:span><text:span text:style-name="T68">：搜尋最快，但插入</text:span><text:span text:style-name="T71">/</text:span><text:span text:style-name="T68">刪除旋轉次數多，修改成本高。</text:span></text:p>
        </text:list-item>
        <text:list-item>
          <text:p text:style-name="P24" loext:marker-style-name="T67"><text:span text:style-name="T71">Red-Black Tree</text:span><text:span text:style-name="T68">：搜尋稍慢，但插入</text:span><text:span text:style-name="T71">/</text:span><text:span text:style-name="T68">刪除旋轉較少，整體效能均衡。</text:span></text:p>
        </text:list-item>
        <text:list-item>
          <text:p text:style-name="P24" loext:marker-style-name="T67"><text:span text:style-name="T71">Linux Kernel </text:span><text:span text:style-name="T68">的 </text:span><text:span text:style-name="T71">CFS </text:span><text:span text:style-name="T68">排程器、記憶體管理（</text:span><text:span text:style-name="T71">VMA</text:span><text:span text:style-name="T68">）、</text:span><text:span text:style-name="T71">Timer </text:span><text:span text:style-name="T68">均採用 </text:span><text:span text:style-name="T71">Red-Black Tree</text:span><text:span text:style-name="T68">。</text:span></text:p>
        </text:list-item>
      </text:list>
      <text:p text:style-name="P3"/>
      <text:p text:style-name="P3"/>
      <text:h text:style-name="P4" text:outline-level="1" loext:marker-style-name="T7"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1</text:span><text:span text:style-name="T75">：</text:span><text:span text:style-name="T23">Heap </text:span><text:span text:style-name="T75">搜尋 ≠ </text:span><text:span text:style-name="T23">O(log n)</text:span><text:span text:style-name="T75">，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2</text:span><text:span text:style-name="T75">：</text:span><text:span text:style-name="T23">Build Heap ≠ O(n log n)</text:span><text:span text:style-name="T75">，</text:span><text:span text:style-name="T23">Bottom-Up </text:span><text:span text:style-name="T75">法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3</text:span><text:span text:style-name="T75">：</text:span><text:span text:style-name="T23">Heap </text:span><text:span text:style-name="T75">是 </text:span><text:span text:style-name="T23">Complete Binary Tree</text:span><text:span text:style-name="T75">，不是 </text:span><text:span text:style-name="T23">Full Binary Tree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ext:soft-page-break/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4</text:span><text:span text:style-name="T75">：陣列索引從 </text:span><text:span text:style-name="T23">1 </text:span><text:span text:style-name="T75">開始，</text:span><text:span text:style-name="T23">parent = ⌊i/2⌋</text:span><text:span text:style-name="T75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5</text:span><text:span text:style-name="T75">：</text:span><text:span text:style-name="T23">Interval Heap </text:span><text:span text:style-name="T75">每個節點存的是區間 </text:span><text:span text:style-name="T23">[min, max]</text:span><text:span text:style-name="T75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6</text:span><text:span text:style-name="T75">：</text:span><text:span text:style-name="T23">Merge Leftist Heap </text:span><text:span text:style-name="T75">的新 </text:span><text:span text:style-name="T23">Root </text:span><text:span text:style-name="T75">是兩個 </text:span><text:span text:style-name="T23">Root </text:span><text:span text:style-name="T75">中較小的（</text:span><text:span text:style-name="T23">Min Heap</text:span><text:span text:style-name="T75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75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7</text:span><text:span text:style-name="T75">：</text:span><text:span text:style-name="T23">Heap Sort </text:span><text:span text:style-name="T75">是 </text:span><text:span text:style-name="T23">Unstable Sort</text:span><text:span text:style-name="T75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8</text:span><text:span text:style-name="T75">：</text:span><text:span text:style-name="T23">Heap Sort </text:span><text:span text:style-name="T75">空間複雜度是 </text:span><text:span text:style-name="T23">O(1)</text:span><text:span text:style-name="T75">（</text:span><text:span text:style-name="T23">In-place</text:span><text:span text:style-name="T75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75">（</text:span><text:span text:style-name="T23">parent ≤/≥ child</text:span><text:span text:style-name="T75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75">陣列索引（從 </text:span><text:span text:style-name="T23">1 </text:span><text:span text:style-name="T75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75">（</text:span><text:span text:style-name="T23">Bubble 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75">（</text:span><text:span text:style-name="T23">Heapify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75">（</text:span><text:span text:style-name="T23">Bottom-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75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逐個 </text:span><text:span text:style-name="T23">Insert </text:span><text:span text:style-name="T75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75">次 </text:span><text:span text:style-name="T23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75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66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40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40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75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75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75">最均衡</text:span></text:p>
          </table:table-cell>
        </table:table-row>
      </table:table>
      <text:p text:style-name="P3"/>
      <text:h text:style-name="P6" text:outline-level="2" loext:marker-style-name="T13"><text:span text:style-name="T66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75">（</text:span><text:span text:style-name="T23">Bubble Down</text:span><text:span text:style-name="T75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75">（</text:span><text:span text:style-name="T23">Bottom-Up</text:span><text:span text:style-name="T75">）</text:span><text:span text:style-name="T23">= O(n) <text:s/>★ </text:span><text:span text:style-name="T75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75">，</text:span><text:span text:style-name="T23">In-place</text:span><text:span text:style-name="T75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24T21:58:27.263436800</dc:date>
    <meta:editing-cycles>210</meta:editing-cycles>
    <meta:editing-duration>PT20H27M10S</meta:editing-duration>
    <meta:generator>LibreOffice/26.2.4.2$Windows_X86_64 LibreOffice_project/0229ac93fcf0d7cbc6376066c6f35021cef002dc</meta:generator>
    <meta:document-statistic meta:table-count="56" meta:image-count="0" meta:object-count="0" meta:page-count="31" meta:paragraph-count="843" meta:word-count="7620" meta:character-count="19999" meta:non-whitespace-character-count="13218"/>
    <meta:user-defined meta:name="AppVersion">15.0000</meta:user-defined>
  </office:meta>
</office:document-meta>
</file>