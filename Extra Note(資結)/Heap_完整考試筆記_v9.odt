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3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4" style:family="paragraph" style:parent-style-name="Standard">
      <style:paragraph-properties fo:margin-top="0.053cm" fo:margin-bottom="0.053cm" style:contextual-spacing="false"/>
    </style:style>
    <style:style style:name="P5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.282cm" style:contextual-spacing="false"/>
    </style:style>
    <style:style style:name="P13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4" style:family="paragraph" style:parent-style-name="Standard">
      <style:paragraph-properties fo:margin-top="0cm" fo:margin-bottom="0.071cm" style:contextual-spacing="false"/>
    </style:style>
    <style:style style:name="P15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7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20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9" style:family="paragraph" style:parent-style-name="List_20_Paragraph" style:list-style-name="WWNum14">
      <style:paragraph-properties fo:margin-top="0cm" fo:margin-bottom="0.141cm" style:contextual-spacing="false"/>
    </style:style>
    <style:style style:name="P3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1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margin-top="0.106cm" fo:margin-bottom="0.106cm" style:contextual-spacing="false"/>
    </style:style>
    <style:style style:name="P34" style:family="paragraph" style:parent-style-name="Standard">
      <style:paragraph-properties fo:margin-top="0.053cm" fo:margin-bottom="0.053cm" style:contextual-spacing="false"/>
    </style:style>
    <style:style style:name="P35" style:family="paragraph" style:parent-style-name="Standard">
      <style:paragraph-properties fo:margin-top="0.318cm" fo:margin-bottom="0.106cm" style:contextual-spacing="false"/>
    </style:style>
    <style:style style:name="P36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7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8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39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40" style:family="paragraph" style:parent-style-name="Standard" style:list-style-name="WWNum2">
      <style:paragraph-properties fo:margin-top="0.071cm" fo:margin-bottom="0.071cm" style:contextual-spacing="false"/>
    </style:style>
    <style:style style:name="P41" style:family="paragraph" style:parent-style-name="Standard">
      <style:paragraph-properties fo:margin-top="0cm" fo:margin-bottom="0.212cm" style:contextual-spacing="false"/>
    </style:style>
    <style:style style:name="P42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3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4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5" style:family="paragraph" style:parent-style-name="Standard">
      <style:paragraph-properties fo:margin-top="0cm" fo:margin-bottom="0.141cm" style:contextual-spacing="false"/>
    </style:style>
    <style:style style:name="P46" style:family="paragraph" style:parent-style-name="Standard">
      <style:paragraph-properties fo:margin-top="0cm" fo:margin-bottom="0cm" style:contextual-spacing="false"/>
    </style:style>
    <style:style style:name="P47" style:family="paragraph" style:parent-style-name="Standard">
      <style:paragraph-properties fo:margin-top="0.353cm" fo:margin-bottom="0.176cm" style:contextual-spacing="false"/>
    </style:style>
    <style:style style:name="P48" style:family="paragraph" style:parent-style-name="Standard">
      <style:text-properties fo:color="#f8bbd0" loext:opacity="100%" fo:font-weight="bold" fo:background-color="#880e4f" style:font-weight-asian="bold" style:font-weight-complex="bold"/>
    </style:style>
    <style:style style:name="P49" style:family="paragraph" style:parent-style-name="Standard">
      <style:text-properties fo:color="#ffff00" loext:opacity="100%" fo:font-weight="bold" fo:background-color="#ff9100" style:font-weight-asian="bold" style:font-weight-complex="bold"/>
    </style:style>
    <style:style style:name="P50" style:family="paragraph" style:parent-style-name="Standard">
      <style:paragraph-properties fo:margin-top="0cm" fo:margin-bottom="0cm" style:contextual-spacing="false"/>
      <style:text-properties fo:color="#ffab40" loext:opacity="100%" fo:font-weight="bold" fo:background-color="#311b92" style:font-weight-asian="bold" style:font-weight-complex="bold"/>
    </style:style>
    <style:style style:name="P51" style:family="paragraph" style:parent-style-name="Standard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5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6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7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8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0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2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4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3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4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5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6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48" style:family="text">
      <style:text-properties fo:color="#595959" loext:opacity="100%" fo:font-size="11pt" style:font-size-asian="11pt" style:font-name-complex="Arial2" style:font-size-complex="11pt"/>
    </style:style>
    <style:style style:name="T49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50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2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59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60" style:family="text">
      <style:text-properties fo:color="#595959" loext:opacity="100%" fo:font-size="10.5pt" style:font-size-asian="10.5pt" style:font-name-complex="Arial2" style:font-size-complex="10.5pt"/>
    </style:style>
    <style:style style:name="T61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2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63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4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65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66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7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8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69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0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1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72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3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4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5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6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7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78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9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80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1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2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3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5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6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7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8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89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90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91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92" style:family="text">
      <style:text-properties fo:color="#18ffff" loext:opacity="100%" style:font-name="Arial1" fo:font-size="12pt" style:font-size-asian="12pt" style:font-name-complex="Arial2" style:font-size-complex="12pt"/>
    </style:style>
    <style:style style:name="T93" style:family="text">
      <style:text-properties fo:color="#18ffff" loext:opacity="100%" style:font-name="Arial1" fo:font-size="12pt" style:font-name-asian="Arial2" style:font-size-asian="12pt" style:font-name-complex="Arial2" style:font-size-complex="12pt"/>
    </style:style>
    <style:style style:name="T94" style:family="text">
      <style:text-properties fo:color="#18ffff" loext:opacity="100%" style:font-name="Arial1" fo:font-size="12pt" fo:background-color="#d500f9" loext:char-shading-value="0" style:font-size-asian="12pt" style:font-name-complex="Arial2" style:font-size-complex="12pt"/>
    </style:style>
    <style:style style:name="T95" style:family="text">
      <style:text-properties fo:color="#18ffff" loext:opacity="100%" style:font-name="Arial1" fo:font-size="12pt" fo:background-color="#d500f9" loext:char-shading-value="0" style:font-size-asian="12pt" style:font-name-complex="Arial2" style:font-size-complex="12pt"/>
    </style:style>
    <style:style style:name="T96" style:family="text">
      <style:text-properties fo:color="#18ffff" loext:opacity="100%" style:font-name="Arial1" fo:font-size="12pt" fo:background-color="#d500f9" loext:char-shading-value="0" style:font-name-asian="Arial2" style:font-size-asian="12pt" style:font-name-complex="Arial2" style:font-size-complex="12pt"/>
    </style:style>
    <style:style style:name="T97" style:family="text">
      <style:text-properties fo:color="#18ffff" loext:opacity="100%" style:font-name="Arial1" fo:font-size="12pt" fo:background-color="#d500f9" loext:char-shading-value="0" style:font-name-asian="Arial2" style:font-size-asian="12pt" style:font-name-complex="Arial2" style:font-size-complex="12pt"/>
    </style:style>
    <style:style style:name="T98" style:family="text">
      <style:text-properties fo:color="#18ffff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99" style:family="text">
      <style:text-properties fo:color="#18ffff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00" style:family="text">
      <style:text-properties fo:color="#18ffff" loext:opacity="100%" style:font-name="Arial1" fo:font-size="12pt" fo:font-weight="normal" fo:background-color="#d500f9" loext:char-shading-value="0" style:font-size-asian="12pt" style:font-weight-asian="normal" style:font-name-complex="Arial2" style:font-size-complex="12pt" style:font-weight-complex="normal"/>
    </style:style>
    <style:style style:name="T101" style:family="text">
      <style:text-properties fo:color="#18ffff" loext:opacity="100%" style:font-name="Arial1" fo:font-size="12pt" fo:font-weight="normal" fo:background-color="#d500f9" loext:char-shading-value="0" style:font-size-asian="12pt" style:font-weight-asian="normal" style:font-name-complex="Arial2" style:font-size-complex="12pt" style:font-weight-complex="normal"/>
    </style:style>
    <style:style style:name="T102" style:family="text">
      <style:text-properties fo:color="#18ffff" loext:opacity="100%" style:font-name="Arial1" fo:font-size="12pt" fo:font-weight="normal" fo:background-color="#d500f9" loext:char-shading-value="0" style:font-name-asian="Arial2" style:font-size-asian="12pt" style:font-weight-asian="normal" style:font-name-complex="Arial2" style:font-size-complex="12pt" style:font-weight-complex="normal"/>
    </style:style>
    <style:style style:name="T103" style:family="text">
      <style:text-properties fo:color="#18ffff" loext:opacity="100%" style:font-name="Arial1" fo:font-size="12pt" fo:font-weight="normal" fo:background-color="#d500f9" loext:char-shading-value="0" style:font-name-asian="Arial2" style:font-size-asian="12pt" style:font-weight-asian="normal" style:font-name-complex="Arial2" style:font-size-complex="12pt" style:font-weight-complex="normal"/>
    </style:style>
    <style:style style:name="T104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105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106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07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8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09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11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112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1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4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15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16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17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18" style:family="text">
      <style:text-properties fo:color="#76ff03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19" style:family="text">
      <style:text-properties fo:color="#76ff03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120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21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22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23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24" style:family="text">
      <style:text-properties fo:color="#76ff03" loext:opacity="100%" style:font-name="Arial1" fo:font-size="12pt" fo:font-weight="bold" fo:background-color="#006064" loext:char-shading-value="0" style:font-size-asian="12pt" style:font-weight-asian="bold" style:font-name-complex="Arial2" style:font-size-complex="12pt" style:font-weight-complex="bold"/>
    </style:style>
    <style:style style:name="T125" style:family="text">
      <style:text-properties fo:color="#76ff03" loext:opacity="100%" style:font-name="Arial1" fo:font-size="12pt" fo:font-weight="bold" fo:background-color="#006064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76ff03" loext:opacity="100%" style:font-name="Arial1" fo:font-size="12pt" fo:background-color="#006064" loext:char-shading-value="0" style:font-size-asian="12pt" style:font-name-complex="Arial2" style:font-size-complex="12pt"/>
    </style:style>
    <style:style style:name="T127" style:family="text">
      <style:text-properties fo:color="#76ff03" loext:opacity="100%" style:font-name="Arial1" fo:font-size="12pt" fo:background-color="#006064" loext:char-shading-value="0" style:font-name-asian="Arial2" style:font-size-asian="12pt" style:font-name-complex="Arial2" style:font-size-complex="12pt"/>
    </style:style>
    <style:style style:name="T128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29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30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3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32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33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5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6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37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38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39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41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42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43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44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45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6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48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49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50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51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52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53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54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55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6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57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8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59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60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61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62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3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64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65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66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68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69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70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71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72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73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74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75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6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77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78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179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80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81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82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83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84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85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86" style:family="text">
      <style:text-properties fo:color="#ffea00" loext:opacity="100%" style:font-name="Arial1" fo:font-size="12pt" fo:font-weight="bold" fo:background-color="#1a237e" loext:char-shading-value="0" style:font-name-asian="Arial2" style:font-size-asian="12pt" style:font-weight-asian="bold" style:font-name-complex="Arial2" style:font-size-complex="12pt" style:font-weight-complex="bold"/>
    </style:style>
    <style:style style:name="T187" style:family="text">
      <style:text-properties fo:color="#ffea0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88" style:family="text">
      <style:text-properties fo:color="#ffea0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89" style:family="text">
      <style:text-properties fo:color="#ffea00" loext:opacity="100%" style:font-name="Arial1" fo:font-size="12pt" fo:font-weight="bold" fo:background-color="#b71c1c" loext:char-shading-value="0" style:font-size-asian="12pt" style:font-weight-asian="bold" style:font-name-complex="Arial2" style:font-size-complex="12pt" style:font-weight-complex="bold"/>
    </style:style>
    <style:style style:name="T190" style:family="text">
      <style:text-properties fo:color="#ffea00" loext:opacity="100%" style:font-name="Arial1" fo:font-size="12pt" fo:font-weight="bold" fo:background-color="#b71c1c" loext:char-shading-value="0" style:font-name-asian="Arial2" style:font-size-asian="12pt" style:font-weight-asian="bold" style:font-name-complex="Arial2" style:font-size-complex="12pt" style:font-weight-complex="bold"/>
    </style:style>
    <style:style style:name="T191" style:family="text">
      <style:text-properties fo:color="#ffea00" loext:opacity="100%" style:font-name="Arial1" fo:font-size="12pt" style:font-name-asian="Arial2" style:font-size-asian="12pt" style:font-name-complex="Arial2" style:font-size-complex="12pt"/>
    </style:style>
    <style:style style:name="T192" style:family="text">
      <style:text-properties fo:color="#ffea00" loext:opacity="100%" style:font-name="Arial1" fo:font-size="12pt" fo:font-weight="normal" fo:background-color="#b71c1c" loext:char-shading-value="0" style:font-size-asian="12pt" style:font-weight-asian="normal" style:font-name-complex="Arial2" style:font-size-complex="12pt" style:font-weight-complex="normal"/>
    </style:style>
    <style:style style:name="T193" style:family="text">
      <style:text-properties fo:color="#ffea00" loext:opacity="100%" style:font-name="Arial1" fo:font-size="12pt" fo:font-weight="normal" fo:background-color="#b71c1c" loext:char-shading-value="0" style:font-name-asian="Arial2" style:font-size-asian="12pt" style:font-weight-asian="normal" style:font-name-complex="Arial2" style:font-size-complex="12pt" style:font-weight-complex="normal"/>
    </style:style>
    <style:style style:name="T194" style:family="text">
      <style:text-properties fo:color="#ffea00" loext:opacity="100%" fo:font-size="11pt" fo:background-color="#3d5afe" loext:char-shading-value="0" style:font-name-asian="Arial2" style:font-size-asian="11pt" style:font-name-complex="Arial2" style:font-size-complex="11pt"/>
    </style:style>
    <style:style style:name="T195" style:family="text">
      <style:text-properties fo:color="#ffea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96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197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198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99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200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201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202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203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204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205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206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207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8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9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210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211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212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213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14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215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216" style:family="text">
      <style:text-properties fo:color="#ffff00" loext:opacity="100%" style:font-name="Arial1" fo:font-size="12pt" fo:font-weight="bold" fo:background-color="#ff9100" loext:char-shading-value="0" style:font-name-asian="Arial2" style:font-size-asian="12pt" style:font-weight-asian="bold" style:font-name-complex="Arial2" style:font-size-complex="12pt" style:font-weight-complex="bold"/>
    </style:style>
    <style:style style:name="T217" style:family="text">
      <style:text-properties fo:color="#ffff00" loext:opacity="100%" style:font-name="Arial1" fo:font-size="12pt" fo:font-weight="bold" fo:background-color="#ff3d00" loext:char-shading-value="0" style:font-size-asian="12pt" style:font-weight-asian="bold" style:font-name-complex="Arial2" style:font-size-complex="12pt" style:font-weight-complex="bold"/>
    </style:style>
    <style:style style:name="T218" style:family="text">
      <style:text-properties fo:color="#ffff00" loext:opacity="100%" style:font-name="Arial1" fo:font-size="12pt" fo:font-weight="bold" fo:background-color="#ff3d00" loext:char-shading-value="0" style:font-name-asian="Arial2" style:font-size-asian="12pt" style:font-weight-asian="bold" style:font-name-complex="Arial2" style:font-size-complex="12pt" style:font-weight-complex="bold"/>
    </style:style>
    <style:style style:name="T219" style:family="text">
      <style:text-properties fo:color="#ffff00" loext:opacity="100%" style:font-name="Arial1" fo:font-size="12pt" fo:background-color="#ff3d00" loext:char-shading-value="0" style:font-size-asian="12pt" style:font-name-complex="Arial2" style:font-size-complex="12pt"/>
    </style:style>
    <style:style style:name="T220" style:family="text">
      <style:text-properties fo:color="#ffff00" loext:opacity="100%" style:font-name="Arial1" fo:font-size="12pt" fo:background-color="#ff3d00" loext:char-shading-value="0" style:font-name-asian="Arial2" style:font-size-asian="12pt" style:font-name-complex="Arial2" style:font-size-complex="12pt"/>
    </style:style>
    <style:style style:name="T221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22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23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224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225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226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227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28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29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0" style:family="text">
      <style:text-properties fo:font-weight="bold" fo:background-color="#ffd740" loext:char-shading-value="0" style:font-weight-asian="bold" style:font-weight-complex="bold"/>
    </style:style>
    <style:style style:name="T231" style:family="text">
      <style:text-properties fo:font-weight="bold" fo:background-color="#18ffff" loext:char-shading-value="0" style:font-weight-asian="bold" style:font-weight-complex="bold"/>
    </style:style>
    <style:style style:name="T232" style:family="text">
      <style:text-properties fo:font-weight="bold" fo:background-color="#ffff00" loext:char-shading-value="0" style:font-weight-asian="bold" style:font-weight-complex="bold"/>
    </style:style>
    <style:style style:name="T233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34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35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236" style:family="text">
      <style:text-properties fo:font-size="10.5pt" style:font-name-asian="Arial2" style:font-size-asian="10.5pt" style:font-name-complex="Arial2" style:font-size-complex="10.5pt"/>
    </style:style>
    <style:style style:name="T237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38" style:family="text">
      <style:text-properties style:font-name="Arial1" fo:font-size="11pt" style:font-name-asian="Arial2" style:font-size-asian="11pt" style:font-name-complex="Arial2" style:font-size-complex="11pt"/>
    </style:style>
    <style:style style:name="T239" style:family="text">
      <style:text-properties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40" style:family="text">
      <style:text-properties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41" style:family="text">
      <style:text-properties style:font-name="Arial1" fo:font-size="12pt" style:font-size-asian="12pt" style:font-name-complex="Arial2" style:font-size-complex="12pt"/>
    </style:style>
    <style:style style:name="T242" style:family="text">
      <style:text-properties style:font-name="Arial1" fo:font-size="12pt" style:font-name-asian="Arial2" style:font-size-asian="12pt" style:font-name-complex="Arial2" style:font-size-complex="12pt"/>
    </style:style>
    <style:style style:name="T243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44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45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46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24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4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49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50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5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52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53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54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55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56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57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58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59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60" style:family="text">
      <style:text-properties fo:color="#1a1a1a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261" style:family="text">
      <style:text-properties fo:color="#1a1a1a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262" style:family="text">
      <style:text-properties fo:color="#1a1a1a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263" style:family="text">
      <style:text-properties fo:color="#1a1a1a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264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65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66" style:family="text">
      <style:text-properties fo:color="#1a1a1a" loext:opacity="100%" style:font-name="Arial1" fo:font-size="12pt" fo:font-weight="normal" fo:background-color="#b71c1c" loext:char-shading-value="0" style:font-size-asian="12pt" style:font-weight-asian="normal" style:font-name-complex="Arial2" style:font-size-complex="12pt" style:font-weight-complex="normal"/>
    </style:style>
    <style:style style:name="T267" style:family="text">
      <style:text-properties fo:color="#1a1a1a" loext:opacity="100%" style:font-name="Arial1" fo:font-size="12pt" fo:font-weight="normal" fo:background-color="#b71c1c" loext:char-shading-value="0" style:font-size-asian="12pt" style:font-weight-asian="normal" style:font-name-complex="Arial2" style:font-size-complex="12pt" style:font-weight-complex="normal"/>
    </style:style>
    <style:style style:name="T268" style:family="text">
      <style:text-properties fo:color="#1a1a1a" loext:opacity="100%" style:font-name="Arial1" fo:font-size="12pt" fo:font-weight="normal" fo:background-color="#b71c1c" loext:char-shading-value="0" style:font-name-asian="Arial2" style:font-size-asian="12pt" style:font-weight-asian="normal" style:font-name-complex="Arial2" style:font-size-complex="12pt" style:font-weight-complex="normal"/>
    </style:style>
    <style:style style:name="T269" style:family="text">
      <style:text-properties fo:color="#1a1a1a" loext:opacity="100%" style:font-name="Arial1" fo:font-size="12pt" fo:font-weight="normal" fo:background-color="#b71c1c" loext:char-shading-value="0" style:font-name-asian="Arial2" style:font-size-asian="12pt" style:font-weight-asian="normal" style:font-name-complex="Arial2" style:font-size-complex="12pt" style:font-weight-complex="normal"/>
    </style:style>
    <style:style style:name="T270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71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72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73" style:family="text">
      <style:text-properties fo:color="#1a1a1a" loext:opacity="100%" style:font-name="Arial1" fo:font-size="12pt" fo:background-color="#006064" loext:char-shading-value="0" style:font-size-asian="12pt" style:font-name-complex="Arial2" style:font-size-complex="12pt"/>
    </style:style>
    <style:style style:name="T274" style:family="text">
      <style:text-properties fo:color="#1a1a1a" loext:opacity="100%" style:font-name="Arial1" fo:font-size="12pt" fo:background-color="#006064" loext:char-shading-value="0" style:font-size-asian="12pt" style:font-name-complex="Arial2" style:font-size-complex="12pt"/>
    </style:style>
    <style:style style:name="T275" style:family="text">
      <style:text-properties fo:color="#1a1a1a" loext:opacity="100%" style:font-name="Arial1" fo:font-size="12pt" fo:background-color="#006064" loext:char-shading-value="0" style:font-name-asian="Arial2" style:font-size-asian="12pt" style:font-name-complex="Arial2" style:font-size-complex="12pt"/>
    </style:style>
    <style:style style:name="T276" style:family="text">
      <style:text-properties fo:color="#1a1a1a" loext:opacity="100%" style:font-name="Arial1" fo:font-size="12pt" fo:background-color="#006064" loext:char-shading-value="0" style:font-name-asian="Arial2" style:font-size-asian="12pt" style:font-name-complex="Arial2" style:font-size-complex="12pt"/>
    </style:style>
    <style:style style:name="T277" style:family="text">
      <style:text-properties fo:color="#1a1a1a" loext:opacity="100%" style:font-name="Arial1" fo:font-size="12pt" fo:background-color="#ff3d00" loext:char-shading-value="0" style:font-size-asian="12pt" style:font-name-complex="Arial2" style:font-size-complex="12pt"/>
    </style:style>
    <style:style style:name="T278" style:family="text">
      <style:text-properties fo:color="#1a1a1a" loext:opacity="100%" style:font-name="Arial1" fo:font-size="12pt" fo:background-color="#ff3d00" loext:char-shading-value="0" style:font-size-asian="12pt" style:font-name-complex="Arial2" style:font-size-complex="12pt"/>
    </style:style>
    <style:style style:name="T279" style:family="text">
      <style:text-properties fo:color="#1a1a1a" loext:opacity="100%" style:font-name="Arial1" fo:font-size="12pt" fo:background-color="#ff3d00" loext:char-shading-value="0" style:font-name-asian="Arial2" style:font-size-asian="12pt" style:font-name-complex="Arial2" style:font-size-complex="12pt"/>
    </style:style>
    <style:style style:name="T280" style:family="text">
      <style:text-properties fo:color="#1a1a1a" loext:opacity="100%" style:font-name="Arial1" fo:font-size="12pt" fo:background-color="#ff3d00" loext:char-shading-value="0" style:font-name-asian="Arial2" style:font-size-asian="12pt" style:font-name-complex="Arial2" style:font-size-complex="12pt"/>
    </style:style>
    <style:style style:name="T281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82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83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84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85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86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87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88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89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90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91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92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93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94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95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96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97" style:family="text">
      <style:text-properties fo:color="#404040" loext:opacity="100%" fo:font-size="11pt" fo:background-color="#3d5afe" loext:char-shading-value="0" style:font-name-asian="Arial2" style:font-size-asian="11pt" style:font-name-complex="Arial2" style:font-size-complex="11pt"/>
    </style:style>
    <style:style style:name="T298" style:family="text">
      <style:text-properties fo:color="#404040" loext:opacity="100%" fo:font-size="11pt" fo:background-color="#3d5afe" loext:char-shading-value="0" style:font-name-asian="Arial2" style:font-size-asian="11pt" style:font-name-complex="Arial2" style:font-size-complex="11pt"/>
    </style:style>
    <style:style style:name="T299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0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301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302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303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04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1" loext:marker-style-name="T15"><text:span text:style-name="T16">資訊類公職考試完整筆記 ● 考點：</text:span><text:span text:style-name="T25">110</text:span><text:span text:style-name="T16">地</text:span><text:span text:style-name="T25">Q4</text:span><text:span text:style-name="T16">、</text:span><text:span text:style-name="T25">111</text:span><text:span text:style-name="T16">地</text:span><text:span text:style-name="T25">Q4</text:span><text:span text:style-name="T16">、</text:span><text:span text:style-name="T25">113</text:span><text:span text:style-name="T16">地</text:span><text:span text:style-name="T25">Q3</text:span><text:span text:style-name="T16">、</text:span><text:span text:style-name="T25">114</text:span><text:span text:style-name="T16">地</text:span><text:span text:style-name="T25">Q2</text:span></text:p>
      <text:p text:style-name="P1"/>
      <text:h text:style-name="P15" text:outline-level="1" loext:marker-style-name="T3"><text:span text:style-name="T4">一、</text:span><text:span text:style-name="T10">Heap </text:span><text:span text:style-name="T4">的定義與兩大條件</text:span></text:h>
      <text:p text:style-name="P33" loext:marker-style-name="T28"><text:span text:style-name="T44">Heap</text:span><text:span text:style-name="T29">（堆積）是一種特殊的二元樹，必須同時滿足以下兩個條件，缺一不可：</text:span></text:p>
      <text:p text:style-name="P1"/>
      <text:h text:style-name="P18" text:outline-level="2" loext:marker-style-name="T17"><text:span text:style-name="T18">條件</text:span><text:span text:style-name="T26">1</text:span><text:span text:style-name="T18">：</text:span><text:span text:style-name="T26">Complete Binary Tree</text:span><text:span text:style-name="T18">（完全二元樹）</text:span></text:h>
      <text:list xml:id="list549856339" text:style-name="WWNum5">
        <text:list-item text:start-value="1">
          <text:p text:style-name="P20" loext:marker-style-name="T34"><text:span text:style-name="T66">每一層節點都必須盡量填滿</text:span><text:span text:style-name="T35">。</text:span></text:p>
        </text:list-item>
        <text:list-item text:style-override="WWNum6">
          <text:p text:style-name="P21" loext:marker-style-name="T34"><text:span text:style-name="T36">最後一層</text:span><text:span text:style-name="T35">的節點必須</text:span><text:span text:style-name="T77">從左往右依序填入</text:span><text:span text:style-name="T35">，</text:span><text:span text:style-name="T80">不可跳過</text:span><text:span text:style-name="T35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 loext:marker-style-name="T42"><text:span text:style-name="T49">✅ </text:span><text:span text:style-name="T43">合法 </text:span><text:span text:style-name="T49">Complete Binary Tree</text:span><text:span text:style-name="T43">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7"/>10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8"/>/ <text:s text:c="2"/>\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4"/>90 <text:s text:c="4"/>8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4"/>/ \ <text:s text:c="5"/>/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37"><text:span text:style-name="T50">70 <text:s/>60 50</text:span><text:span text:style-name="T37"/></text:p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❌ </text:span><text:span text:style-name="T43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7"/>10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8"/>/ <text:s text:c="2"/>\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4"/>90 <text:s text:c="4"/>8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8"/>\ <text:s text:c="2"/>/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4" loext:marker-style-name="T42"><text:span text:style-name="T49"><text:s text:c="6"/></text:span><text:span text:style-name="T50">60 50</text:span></text:p>
          </table:table-cell>
        </table:table-row>
      </table:table>
      <text:p text:style-name="P1"/>
      <text:h text:style-name="P18" text:outline-level="2" loext:marker-style-name="T17"><text:span text:style-name="T18">條件</text:span><text:span text:style-name="T26">2</text:span><text:span text:style-name="T18">：</text:span><text:span text:style-name="T26">Heap Property</text:span><text:span text:style-name="T18">（堆積性質）</text:span></text:h>
      <text:p text:style-name="P33" loext:marker-style-name="T28"><text:span text:style-name="T29">父節點與子節點之間必須滿足固定的大小關係，分為兩種：</text:span><text:span text:style-name="T28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2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2" loext:marker-style-name="T42"><text:span text:style-name="T114">Min</text:span><text:span text:style-name="T49"> Heap</text:span></text:p>
          </table:table-cell>
          <table:table-cell table:style-name="表格2.A2" office:value-type="string">
            <text:p text:style-name="P32" loext:marker-style-name="T42"><text:span text:style-name="T49">parent ≤ child</text:span><text:span text:style-name="T43">（</text:span><text:span text:style-name="T38">父小子大</text:span><text:span text:style-name="T43">）</text:span></text:p>
          </table:table-cell>
          <table:table-cell table:style-name="表格2.A2" office:value-type="string">
            <text:p text:style-name="P32" loext:marker-style-name="T42"><text:span text:style-name="T49">Root </text:span><text:span text:style-name="T43">必為最小值</text:span></text:p>
          </table:table-cell>
        </table:table-row>
        <table:table-row table:style-name="表格2.1">
          <table:table-cell table:style-name="表格2.A3" office:value-type="string">
            <text:p text:style-name="P32" loext:marker-style-name="T42"><text:span text:style-name="T131">Max</text:span><text:span text:style-name="T49"> Heap</text:span></text:p>
          </table:table-cell>
          <table:table-cell table:style-name="表格2.A3" office:value-type="string">
            <text:p text:style-name="P32" loext:marker-style-name="T42"><text:span text:style-name="T49">parent ≥ child</text:span><text:span text:style-name="T43">（</text:span><text:span text:style-name="T39">父大子小</text:span><text:span text:style-name="T43">）</text:span></text:p>
          </table:table-cell>
          <table:table-cell table:style-name="表格2.A3" office:value-type="string">
            <text:p text:style-name="P32" loext:marker-style-name="T42"><text:span text:style-name="T49">Root </text:span><text:span text:style-name="T43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" loext:marker-style-name="T42"><text:span text:style-name="T49">📌 </text:span><text:span text:style-name="T43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4" loext:marker-style-name="T42"><text:span text:style-name="T50">Heap</text:span><text:span text:style-name="T49"> = </text:span><text:span text:style-name="T140">Complete Binary Tree + Heap Property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3" loext:marker-style-name="T28"><text:span text:style-name="T29">由於 </text:span><text:span text:style-name="T142">Heap </text:span><text:span text:style-name="T144">是 </text:span><text:span text:style-name="T142">Complete Binary Tree</text:span><text:span text:style-name="T29">，</text:span><text:span text:style-name="T158">節點位置完全可預測</text:span><text:span text:style-name="T29">，因此不需要指標（</text:span><text:span text:style-name="T44">pointer</text:span><text:span text:style-name="T29">），直接用陣列儲存即可，這稱為 </text:span><text:span text:style-name="T44">Implicit Array</text:span><text:span text:style-name="T29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" loext:marker-style-name="T42"><text:span text:style-name="T43">【索引公式 — 考試必背】</text:span><text:span text:style-name="T42"/></text:p>
          </table:table-cell>
        </table:table-row>
        <table:table-row table:style-name="表格4.1">
          <table:table-cell table:style-name="表格4.A1" office:value-type="string">
            <text:p text:style-name="P4" loext:marker-style-name="T42"><text:span text:style-name="T49"><text:s text:c="2"/>Root <text:s text:c="5"/>→ A[1]</text:span><text:span text:style-name="T42"/></text:p>
          </table:table-cell>
        </table:table-row>
        <table:table-row table:style-name="表格4.1">
          <table:table-cell table:style-name="表格4.A1" office:value-type="string">
            <text:p text:style-name="P4" loext:marker-style-name="T42"><text:span text:style-name="T49"><text:s text:c="2"/></text:span><text:span text:style-name="T167">Parent</text:span><text:span text:style-name="T49"> <text:s text:c="3"/>→ A[</text:span><text:span text:style-name="T104">i / 2</text:span><text:span text:style-name="T49">] <text:s text:c="5"/></text:span><text:span text:style-name="T43">（整數除法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2"><text:span text:style-name="T49"><text:s text:c="2"/></text:span><text:span text:style-name="T151">Left child</text:span><text:span text:style-name="T49"> → A[</text:span><text:span text:style-name="T115">2i</text:span><text:span text:style-name="T49">] <text:s text:c="6"/></text:span><text:span text:style-name="T43">（</text:span><text:span text:style-name="T176">多生貴子</text:span><text:span text:style-name="T43">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2"><text:span text:style-name="T49"><text:s text:c="2"/></text:span><text:span text:style-name="T151">Right child</text:span><text:span text:style-name="T49"> → A[</text:span><text:span text:style-name="T115">2i + 1</text:span><text:span text:style-name="T49">]</text:span></text:p>
          </table:table-cell>
        </table:table-row>
      </table:table>
      <text:p text:style-name="P1"/>
      <text:h text:style-name="P18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4" loext:marker-style-name="T42"><text:span text:style-name="T43">樹狀結構：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 text:c="8"/>10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 text:c="7"/>/ <text:s text:c="2"/>\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 text:c="5"/>90 <text:s text:c="4"/>8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 text:c="5"/>/ \ <text:s text:c="4"/>/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/>70 <text:s/>60 5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3">陣列儲存：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 text:c="2"/>Index: <text:s/>1 <text:s text:c="3"/>2 <text:s text:c="3"/>3 <text:s text:c="3"/>4 <text:s text:c="3"/>5 <text:s text:c="3"/>6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 text:c="2"/>Value: 100 <text:s text:c="2"/>90 <text:s text:c="2"/>80 <text:s text:c="2"/>70 <text:s text:c="2"/>60 <text:s text:c="2"/>5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3">驗證：</text:span><text:span text:style-name="T49">A[5] = 60</text:span><text:span text:style-name="T43">，</text:span><text:span text:style-name="T117">Parent = A[5/2] = A[2] </text:span><text:span text:style-name="T49">= 90 ✅</text:span></text:p>
          </table:table-cell>
        </table:table-row>
        <table:table-row table:style-name="表格5.1">
          <table:table-cell table:style-name="表格5.A1" office:value-type="string">
            <text:p text:style-name="P4" loext:marker-style-name="T42"><text:span text:style-name="T49"><text:s text:c="6"/></text:span><text:span text:style-name="T106">Left child = A[10]</text:span><text:span text:style-name="T43">，</text:span><text:span text:style-name="T178">Right child = A[11]</text:span><text:span text:style-name="T43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4" loext:marker-style-name="T42"><text:span text:style-name="T49">⚠️ <text:s/></text:span><text:span text:style-name="T43">考試陷阱：</text:span><text:span text:style-name="T81">陣列索引從 </text:span><text:span text:style-name="T104">1 </text:span><text:span text:style-name="T81">開始</text:span><text:span text:style-name="T43">，</text:span><text:span text:style-name="T36">不是 </text:span><text:span text:style-name="T50">0</text:span><text:span text:style-name="T43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2"><text:span text:style-name="T49"><text:s text:c="5"/></text:span><text:span text:style-name="T43">若從 </text:span><text:span text:style-name="T49">0 </text:span><text:span text:style-name="T43">開始則公式不同：</text:span><text:span text:style-name="T49">parent=(i-1)/2, left=2i+1, right=2i+2</text:span><text:span text:style-name="T43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2"><text:span text:style-name="T49"><text:s text:c="5"/></text:span><text:span text:style-name="T43">考題若未特別說明，</text:span><text:span text:style-name="T196">預設從 </text:span><text:span text:style-name="T197">1 </text:span><text:span text:style-name="T196">開始</text:span><text:span text:style-name="T43">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三、</text:span><text:span text:style-name="T10">Heap </text:span><text:span text:style-name="T4">的核心操作與時間複雜度</text:span></text:h>
      <text:h text:style-name="P18" text:outline-level="2" loext:marker-style-name="T17"><text:span text:style-name="T26">3-1 </text:span><text:span text:style-name="T18">插入（</text:span><text:span text:style-name="T26">Insert</text:span><text:span text:style-name="T18">）— </text:span><text:span text:style-name="T26">Bubble Up</text:span><text:span text:style-name="T18">（向上浮）</text:span></text:h>
      <text:p text:style-name="P33" loext:marker-style-name="T28"><text:span text:style-name="T29">步驟：</text:span><text:span text:style-name="T28"/></text:p>
      <text:list xml:id="list144004907637861" text:continue-list="list549856339" text:style-name="WWNum7">
        <text:list-item>
          <text:p text:style-name="P22" loext:marker-style-name="T34"><text:span text:style-name="T59">Step 1</text:span><text:span text:style-name="T35">：</text:span><text:span text:style-name="T198">將新元素放到陣列最後一個位置</text:span><text:span text:style-name="T35">（</text:span><text:span text:style-name="T59">Complete Binary Tree </text:span><text:span text:style-name="T35">的下一個</text:span><text:span text:style-name="T36">空位</text:span><text:span text:style-name="T35">）。</text:span></text:p>
        </text:list-item>
        <text:list-item text:style-override="WWNum8">
          <text:p text:style-name="P23" loext:marker-style-name="T34"><text:span text:style-name="T59">Step 2</text:span><text:span text:style-name="T35">：</text:span><text:span text:style-name="T170">與父節點比較</text:span><text:span text:style-name="T35">，若違反 </text:span><text:span text:style-name="T59">Heap Property</text:span><text:span text:style-name="T35">，則交換。</text:span></text:p>
        </text:list-item>
        <text:list-item text:style-override="WWNum9">
          <text:p text:style-name="P24" loext:marker-style-name="T34"><text:span text:style-name="T59">Step 3</text:span><text:span text:style-name="T35">：重複 </text:span><text:span text:style-name="T59">Step 2</text:span><text:span text:style-name="T35">，一路往上，直到滿足 </text:span><text:span text:style-name="T59">Heap Property </text:span><text:span text:style-name="T35">或抵達 </text:span><text:span text:style-name="T59">Root </text:span><text:span text:style-name="T35">為止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4" loext:marker-style-name="T42"><text:span text:style-name="T43">原始 </text:span><text:span text:style-name="T49">Max Heap</text:span><text:span text:style-name="T43">：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8"/>10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7"/>/ <text:s text:c="2"/>\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6"/>90 <text:s text:c="3"/>8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5"/>/ <text:s/>\ <text:s text:c="3"/>/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70 <text:s/>60 5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3">陣列：</text:span><text:span text:style-name="T49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Step 1</text:span><text:span text:style-name="T43">：</text:span><text:span text:style-name="T36">插入 </text:span><text:span text:style-name="T50">95</text:span><text:span text:style-name="T49"> → </text:span><text:span text:style-name="T38">放到 </text:span><text:span text:style-name="T52">index 7</text:span><text:span text:style-name="T38">（最後）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3">陣列：</text:span><text:span text:style-name="T49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Step 2</text:span><text:span text:style-name="T43">：</text:span><text:span text:style-name="T209">95 </text:span><text:span text:style-name="T210">的 </text:span><text:span text:style-name="T209">parent = A[7/2] = A[3]</text:span><text:span text:style-name="T49"> = 8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8"/></text:span><text:span text:style-name="T50">95 &gt; 80</text:span><text:span text:style-name="T49"> → </text:span><text:span text:style-name="T43">違反 </text:span><text:span text:style-name="T49">Max Heap → </text:span><text:span text:style-name="T40">交換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3">陣列：</text:span><text:span text:style-name="T49">[100, 90, </text:span><text:span text:style-name="T54">95</text:span><text:span text:style-name="T49">, 70, 60, 50, </text:span><text:span text:style-name="T54">80</text:span><text:span text:style-name="T49">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Step 3</text:span><text:span text:style-name="T43">：</text:span><text:span text:style-name="T209">95 </text:span><text:span text:style-name="T210">的 </text:span><text:span text:style-name="T209">parent = A[3/2] = A[1]</text:span><text:span text:style-name="T49"> = 10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7"/></text:span><text:span text:style-name="T50"><text:s/>95 &lt; 100</text:span><text:span text:style-name="T49"> → </text:span><text:span text:style-name="T43">符合 </text:span><text:span text:style-name="T49">Max Heap → </text:span><text:span text:style-name="T40">停止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ext:soft-page-break/>
        <table:table-row table:style-name="表格7.1">
          <table:table-cell table:style-name="表格7.A1" office:value-type="string">
            <text:p text:style-name="P4" loext:marker-style-name="T42"><text:span text:style-name="T43">最終結果：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8"/>10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7"/>/ <text:s text:c="2"/>\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4" loext:marker-style-name="T42"><text:span text:style-name="T49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6" loext:marker-style-name="T42"><text:span text:style-name="T49"><text:s text:c="5"/>/ <text:s/>\ <text:s text:c="2"/>/</text:span><text:span text:style-name="T42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7" loext:marker-style-name="T42"><text:s/><text:span text:style-name="T49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4" loext:marker-style-name="T42"><text:span text:style-name="T43">時間複雜度：</text:span><text:span text:style-name="T49">O(log n) <text:s/>← </text:span><text:span text:style-name="T43">最多往上走樹高（</text:span><text:span text:style-name="T49">h = log₂n</text:span><text:span text:style-name="T43">）步</text:span></text:p>
          </table:table-cell>
        </table:table-row>
      </table:table>
      <text:p text:style-name="P1"/>
      <text:p text:style-name="P1"/>
      <text:h text:style-name="P18" text:outline-level="2" loext:marker-style-name="T17"><text:span text:style-name="T26">3-2 </text:span><text:span text:style-name="T82">刪除最大值</text:span><text:span text:style-name="T18">（</text:span><text:span text:style-name="T26">Delete / Extract-Max</text:span><text:span text:style-name="T18">）— </text:span><text:span text:style-name="T26">Heapify</text:span><text:span text:style-name="T18">（向下沉）</text:span></text:h>
      <text:p text:style-name="P33" loext:marker-style-name="T28"><text:span text:style-name="T29">步驟：</text:span><text:span text:style-name="T28"/></text:p>
      <text:list xml:id="list144004533535285" text:continue-list="list144004907637861" text:style-name="WWNum10">
        <text:list-item>
          <text:p text:style-name="P25" loext:marker-style-name="T34"><text:span text:style-name="T59">Step 1</text:span><text:span text:style-name="T35">：</text:span><text:span text:style-name="T198">取出 </text:span><text:span text:style-name="T203">Root</text:span><text:span text:style-name="T198">（最大值）</text:span><text:span text:style-name="T35">。</text:span></text:p>
        </text:list-item>
        <text:list-item text:style-override="WWNum11">
          <text:p text:style-name="P26" loext:marker-style-name="T34"><text:span text:style-name="T59">Step 2</text:span><text:span text:style-name="T35">：</text:span><text:span text:style-name="T146">將陣列最後一個元素移到 </text:span><text:span text:style-name="T151">Root </text:span><text:span text:style-name="T146">位置。</text:span></text:p>
        </text:list-item>
        <text:list-item text:style-override="WWNum12">
          <text:p text:style-name="P27" loext:marker-style-name="T34"><text:span text:style-name="T59">Step 3</text:span><text:span text:style-name="T35">：</text:span><text:span text:style-name="T170">與兩個子節點中</text:span><text:span text:style-name="T212">較大的</text:span><text:span text:style-name="T170">比較</text:span><text:span text:style-name="T35">，若違反 </text:span><text:span text:style-name="T59">Heap Property</text:span><text:span text:style-name="T35">，則交換。</text:span></text:p>
        </text:list-item>
        <text:list-item text:style-override="WWNum13">
          <text:p text:style-name="P28" loext:marker-style-name="T34"><text:span text:style-name="T59">Step 4</text:span><text:span text:style-name="T35">：重複 </text:span><text:span text:style-name="T59">Step 3</text:span><text:span text:style-name="T35">（</text:span><text:span text:style-name="T59">Heapify / Bubble Down</text:span><text:span text:style-name="T35">），一路往下，直到滿足條件或抵達葉節點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" loext:marker-style-name="T42"><text:span text:style-name="T43">原始 </text:span><text:span text:style-name="T49">Max Heap</text:span><text:span text:style-name="T43">：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9"/>10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8"/>/ <text:s text:c="2"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7"/>90 <text:s text:c="3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6"/>/ \ <text:s text:c="2"/>/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/>70 <text:s/>60 <text:s/>5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Step 1</text:span><text:span text:style-name="T43">：取出 </text:span><text:span text:style-name="T49">Root = 10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Step 2</text:span><text:span text:style-name="T43">：</text:span><text:span text:style-name="T81">把最後元素 </text:span><text:span text:style-name="T104">50 </text:span><text:span text:style-name="T81">移到 </text:span><text:span text:style-name="T104">Root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9"/>5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7"/>9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4"/>70 <text:s/>60</text:span><text:span text:style-name="T4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Step 3</text:span><text:span text:style-name="T43">：</text:span><text:span text:style-name="T117">50 </text:span><text:span text:style-name="T120">的子節點 </text:span><text:span text:style-name="T117">90</text:span><text:span text:style-name="T120">、</text:span><text:span text:style-name="T117">80</text:span><text:span text:style-name="T120">，較大為 </text:span><text:span text:style-name="T117">9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8"/>50 &lt; 90 → </text:span><text:span text:style-name="T43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9"/>9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7"/>5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4"/>70 <text:s/>6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Step 4</text:span><text:span text:style-name="T43">：</text:span><text:span text:style-name="T117">50 </text:span><text:span text:style-name="T120">的子節點 </text:span><text:span text:style-name="T117">70</text:span><text:span text:style-name="T120">、</text:span><text:span text:style-name="T117">60</text:span><text:span text:style-name="T120">，較大為 </text:span><text:span text:style-name="T117">7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8"/>50 &lt; 70 → </text:span><text:span text:style-name="T43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9"/>9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7"/>7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<text:s text:c="3"/>50 <text:s/>6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9">Step 5</text:span><text:span text:style-name="T43">：</text:span><text:span text:style-name="T49">50 </text:span><text:span text:style-name="T43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2"><text:span text:style-name="T43">最終陣列：</text:span><text:span text:style-name="T49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" loext:marker-style-name="T42"><text:span text:style-name="T41">時間複雜度：</text:span><text:span text:style-name="T54">O(log n) </text:span><text:span text:style-name="T49"><text:s/>← </text:span><text:span text:style-name="T43">最多往下走樹高（</text:span><text:span text:style-name="T49">h = log₂n</text:span><text:span text:style-name="T43">）步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8" text:outline-level="2" loext:marker-style-name="T17"><text:span text:style-name="T18">方法 </text:span><text:span text:style-name="T27">A</text:span><text:span text:style-name="T18">：逐個插入法</text:span></text:h>
      <text:p text:style-name="P33" loext:marker-style-name="T30"><text:span text:style-name="T31">從</text:span><text:span text:style-name="T83">空</text:span><text:span text:style-name="T31"> </text:span><text:span text:style-name="T45">Heap</text:span><text:span text:style-name="T48"> </text:span><text:span text:style-name="T31">開始，呼叫 </text:span><text:span text:style-name="T128">n </text:span><text:span text:style-name="T121">次 </text:span><text:span text:style-name="T128">Insert</text:span><text:span text:style-name="T31">，每次 </text:span><text:span text:style-name="T206">O(log n)</text:span><text:span text:style-name="T3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" loext:marker-style-name="T42"><text:span text:style-name="T60">總時間：</text:span><text:span text:style-name="T168">n × O(log n)</text:span><text:span text:style-name="T49"> = O(n log n)</text:span></text:p>
          </table:table-cell>
        </table:table-row>
      </table:table>
      <text:p text:style-name="P1"/>
      <text:h text:style-name="P18" text:outline-level="2" loext:marker-style-name="T17"><text:span text:style-name="T18">方法 </text:span><text:span text:style-name="T27">B</text:span><text:span text:style-name="T18">：</text:span><text:span text:style-name="T26">Bottom-Up Build Heap</text:span><text:span text:style-name="T18">（</text:span><text:span text:style-name="T26">Floyd</text:span><text:span text:style-name="T27"> </text:span><text:span text:style-name="T18">演算法）★考試重點★</text:span></text:h>
      <text:p text:style-name="P33" loext:marker-style-name="T30"><text:span text:style-name="T31">直接</text:span><text:span text:style-name="T213">將 </text:span><text:span text:style-name="T222">n </text:span><text:span text:style-name="T213">個元素放入陣列</text:span><text:span text:style-name="T31">，從</text:span><text:span text:style-name="T83">最後一個非葉節點（</text:span><text:span text:style-name="T109">index = ⌊n/2⌋</text:span><text:span text:style-name="T83">）開始</text:span><text:span text:style-name="T31">，</text:span><text:span text:style-name="T171">由下往上</text:span><text:span text:style-name="T31">逐一執行 </text:span><text:span text:style-name="T48">Heapify</text:span><text:span text:style-name="T31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8" loext:marker-style-name="T224"><text:span text:style-name="T224">★ </text:span><text:span text:style-name="T225">為何從 <text:s text:c="2"/>?</text:span><text:span text:style-name="T224"> <text:s/>⌊n/2⌋ </text:span><text:span text:style-name="T225">開始？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2"><text:span text:style-name="T104">index &gt; ⌊n/2⌋ </text:span><text:span text:style-name="T105">的節點全部都是葉節點</text:span><text:span text:style-name="T60">（</text:span><text:span text:style-name="T70">無子節點</text:span><text:span text:style-name="T60">），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2"><text:span text:style-name="T60">葉節點本身已滿足 </text:span><text:span text:style-name="T49">Heap Property(</text:span><text:span text:style-name="T168">Heap Property</text:span><text:span text:style-name="T169">就是比較父節點</text:span><text:span text:style-name="T168">vs</text:span><text:span text:style-name="T169">子節點</text:span><text:span text:style-name="T60">；</text:span><text:span text:style-name="T204">葉節點沒有孩子 → 沒有東西可以比較 </text:span><text:span text:style-name="T43">→ 一定合法</text:span><text:span text:style-name="T60">。</text:span><text:span text:style-name="T49">)</text:span><text:span text:style-name="T60">，不需要 </text:span><text:span text:style-name="T49">Heapify</text:span><text:span text:style-name="T60">。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2"><text:span text:style-name="T60">因此</text:span><text:span text:style-name="T152">只需從 </text:span><text:span text:style-name="T151">index ⌊n/2⌋ </text:span><text:span text:style-name="T152">往 </text:span><text:span text:style-name="T151">index 1 </text:span><text:span text:style-name="T152">逐一執行</text:span><text:span text:style-name="T60">。</text:span></text:p>
          </table:table-cell>
        </table:table-row>
      </table:table>
      <text:p text:style-name="P1"/>
      <text:p text:style-name="P39" loext:marker-style-name="T30"><text:span text:style-name="T32">範例：將 </text:span><text:span text:style-name="T46">[50, 30, 80, 10, 20, 70, 90] </text:span><text:span text:style-name="T32">建成 </text:span><text:span text:style-name="T46">Max Heap <text:s text:c="61"/></text:span></text:p>
      <text:p text:style-name="P39" loext:marker-style-name="T30"><text:span text:style-name="T46"/></text:p>
      <text:p text:style-name="P39" loext:marker-style-name="T30"><text:span text:style-name="T46">(</text:span><text:span text:style-name="T134">index = ⌊n/2⌋為最後一個非葉節點；index &gt; ⌊n/2⌋ 的節點全部都是葉節點</text:span><text:span text:style-name="T46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" loext:marker-style-name="T42"><text:span text:style-name="T60">初始陣列（</text:span><text:span text:style-name="T49">index </text:span><text:span text:style-name="T60">從 </text:span><text:span text:style-name="T49">1 </text:span><text:span text:style-name="T60">開始）：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49">index</text:span><text:span text:style-name="T60">： <text:s/></text:span><text:span text:style-name="T49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49">value</text:span><text:span text:style-name="T60">： <text:s/></text:span><text:span text:style-name="T49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50">n = 7</text:span><text:span text:style-name="T60">，</text:span><text:span text:style-name="T72">最後非葉節點 </text:span><text:span text:style-name="T73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60">（</text:span><text:span text:style-name="T107">index 4</text:span><text:span text:style-name="T108">、</text:span><text:span text:style-name="T107">5</text:span><text:span text:style-name="T108">、</text:span><text:span text:style-name="T107">6</text:span><text:span text:style-name="T108">、</text:span><text:span text:style-name="T107">7 </text:span><text:span text:style-name="T108">皆為葉節點</text:span><text:span text:style-name="T60">，不需 </text:span><text:span text:style-name="T49">Heapify</text:span><text:span text:style-name="T60">）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60">初始樹狀結構：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49"><text:s text:c="13"/>50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49"><text:s text:c="12"/>/ <text:s/>\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49"><text:s text:c="8"/>30 <text:s text:c="3"/>80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49"><text:s text:c="7"/>/ \ <text:s text:c="6"/>/ \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2"><text:span text:style-name="T49"><text:s text:c="3"/>10 <text:s/>20 70 <text:s/>90</text:span><text:span text:style-name="T42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42"><text:span text:style-name="T49">→</text:span><text:span text:style-name="T61"> </text:span><text:span text:style-name="T163">Heapify(3)</text:span><text:span text:style-name="T164">：</text:span><text:span text:style-name="T163">index 3 = 8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2"/></text:span><text:span text:style-name="T60">子節點：</text:span><text:span text:style-name="T49">index 6 = 70</text:span><text:span text:style-name="T60">，</text:span><text:span text:style-name="T49">index 7 = 9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2"/></text:span><text:span text:style-name="T54">Max Heap </text:span><text:span text:style-name="T55">要求父 ≥ 子</text:span><text:span text:style-name="T60">，但 </text:span><text:span text:style-name="T49">80 &lt; 90 → </text:span><text:span text:style-name="T60">違反！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2"/>80 </text:span><text:span text:style-name="T60">與 </text:span><text:span text:style-name="T49">90 </text:span><text:span text:style-name="T60">交換</text:span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2"/></text:span><text:span text:style-name="T60">交換後：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13"/>50</text:span><text:span text:style-name="T42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4" loext:marker-style-name="T42"><text:span text:style-name="T49"><text:s text:c="13"/>/ <text:s/>\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8"/>30 <text:s text:c="3"/>90 <text:s text:c="5"/>← 90 </text:span><text:span text:style-name="T60">上來了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5"/>/ \ <text:s text:c="6"/>/ \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/>10 <text:s/>20 70 <text:s/>80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2"/></text:span><text:span text:style-name="T60">陣列：</text:span><text:span text:style-name="T49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2"><text:span text:style-name="T49"><text:s text:c="2"/>80 </text:span><text:span text:style-name="T60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" loext:marker-style-name="T42"><text:span text:style-name="T49">→</text:span><text:span text:style-name="T163"> Heapify(2)</text:span><text:span text:style-name="T164">：</text:span><text:span text:style-name="T163">index 2 = 3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2"/></text:span><text:span text:style-name="T60">子節點：</text:span><text:span text:style-name="T49">index 4 = 10</text:span><text:span text:style-name="T60">，</text:span><text:span text:style-name="T49">index 5 = 2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2"/></text:span><text:span text:style-name="T52">30 ≥ 20 </text:span><text:span text:style-name="T53">且 </text:span><text:span text:style-name="T52">30 ≥ 10 → </text:span><text:span text:style-name="T53">符合 </text:span><text:span text:style-name="T52">Max Heap → </text:span><text:span text:style-name="T53">無需交換</text:span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2"/></text:span><text:span text:style-name="T60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11"/>5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10"/>/ <text:s/>\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8"/>30 <text:s text:c="3"/>9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7"/>/ \ <text:s text:c="2"/>/ \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5"/>10 <text:s/>20 70 <text:s/>8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2"><text:span text:style-name="T49"><text:s text:c="2"/></text:span><text:span text:style-name="T60">陣列：</text:span><text:span text:style-name="T49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" loext:marker-style-name="T42"><text:span text:style-name="T49">→ </text:span><text:span text:style-name="T163">Heapify(1)</text:span><text:span text:style-name="T164">：</text:span><text:span text:style-name="T163">index 1 = 5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60">子節點：</text:span><text:span text:style-name="T49">index 2 = 30</text:span><text:span text:style-name="T60">，</text:span><text:span text:style-name="T49">index 3 = 9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105">較大子節點</text:span><text:span text:style-name="T60">為 </text:span><text:span text:style-name="T49">90 &gt; 50 → </text:span><text:span text:style-name="T50">50 </text:span><text:span text:style-name="T51">與 </text:span><text:span text:style-name="T50">90 </text:span><text:span text:style-name="T51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60">第 </text:span><text:span text:style-name="T49">1 </text:span><text:span text:style-name="T60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11"/>90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10"/>/ <text:s/>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8"/>30 <text:s text:c="3"/>50 <text:s text:c="5"/>← </text:span><text:span text:style-name="T56">50 </text:span><text:span text:style-name="T57">下沉到 </text:span><text:span text:style-name="T56">index 3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7"/>/ \ <text:s text:c="2"/>/ 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5"/>10 <text:s/>20 70 <text:s/>80</text:span><text:span text:style-name="T42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60">陣列：</text:span><text:span text:style-name="T49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203">50 </text:span><text:span text:style-name="T204">繼續下沉</text:span><text:span text:style-name="T60">：子節點 </text:span><text:span text:style-name="T49">index 6 = 70</text:span><text:span text:style-name="T60">，</text:span><text:span text:style-name="T49">index 7 = 8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105">較大子節點</text:span><text:span text:style-name="T60">為 </text:span><text:span text:style-name="T49">80 &gt; 50 → </text:span><text:span text:style-name="T50">50 </text:span><text:span text:style-name="T51">與 </text:span><text:span text:style-name="T50">80 </text:span><text:span text:style-name="T51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60">第 </text:span><text:span text:style-name="T49">2 </text:span><text:span text:style-name="T60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11"/>90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10"/>/ <text:s/>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8"/>30 <text:s text:c="3"/>80 <text:s text:c="5"/>← 80 </text:span><text:span text:style-name="T60">上來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7"/>/ \ <text:s text:c="6"/>/ 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4"/>10 <text:s/>20 70 <text:s/>50 <text:s text:c="3"/>← 50 </text:span><text:span text:style-name="T60">落到葉節點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50 </text:span><text:span text:style-name="T60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2"><text:span text:style-name="T49"><text:s text:c="2"/></text:span><text:span text:style-name="T60">陣列：</text:span><text:span text:style-name="T49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" loext:marker-style-name="T42"><text:span text:style-name="T60">最終結果：</text:span><text:span text:style-name="T49">Max Heap ✓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2"><text:span text:style-name="T49"><text:s text:c="11"/>90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2"><text:span text:style-name="T49"><text:s text:c="10"/>/ <text:s/>\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2"><text:span text:style-name="T49"><text:s text:c="8"/>30 <text:s text:c="3"/>80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2"><text:span text:style-name="T49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4" loext:marker-style-name="T42"><text:span text:style-name="T49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2"><text:span text:style-name="T60">陣列：</text:span><text:span text:style-name="T49">[90, 30, 80, 10, 20, 70, 50]</text:span></text:p>
          </table:table-cell>
        </table:table-row>
      </table:table>
      <text:p text:style-name="P1"/>
      <text:h text:style-name="P18" text:outline-level="2" loext:marker-style-name="T17"><text:span text:style-name="T27">★ </text:span><text:span text:style-name="T82">為何 </text:span><text:span text:style-name="T111">Bottom-Up Build Heap</text:span><text:span text:style-name="T112"> =</text:span><text:span text:style-name="T27"> </text:span><text:span text:style-name="T228">O(n)</text:span><text:span text:style-name="T18">？</text:span></text:h>
      <text:p text:style-name="P33" loext:marker-style-name="T30"><text:span text:style-name="T31">關鍵直覺：</text:span><text:span text:style-name="T171">每個節點 </text:span><text:span text:style-name="T174">Heapify </text:span><text:span text:style-name="T171">的代價 </text:span><text:span text:style-name="T174">= </text:span><text:span text:style-name="T171">它在樹中的「高度」</text:span><text:span text:style-name="T31">（</text:span><text:span text:style-name="T145">往下最多能走幾層</text:span><text:span text:style-name="T31">）。</text:span></text:p>
      <text:p text:style-name="P33" loext:marker-style-name="T30"><text:span text:style-name="T122">高度愈低的節點數量愈多，代價愈小；高度愈高的節點數量愈少，代價愈大</text:span><text:span text:style-name="T31">。</text:span><text:span text:style-name="T199">兩者相乘加總後收斂至 </text:span><text:span text:style-name="T206">O(n)</text:span><text:span text:style-name="T31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4">★ 為何 Build Heap 是 O(n)？</text:p>
            <text:p text:style-name="P4"/>
            <text:p text:style-name="P4">Build Heap 由下往上<text:span text:style-name="T211">對每個非葉節點執行 Heapify</text:span>。</text:p>
            <text:p text:style-name="P4"/>
            <text:p text:style-name="P4">以完全二元樹為例：</text:p>
            <text:p text:style-name="P4"/>
            <text:p text:style-name="P4"><text:span text:style-name="T230">高度0（葉節點）約有 </text:span><text:span text:style-name="T231">n/2</text:span><text:span text:style-name="T230"> 個</text:span>，<text:span text:style-name="T232">每個最多移動 0 步</text:span></text:p>
            <text:p text:style-name="P4"><text:span text:style-name="T230">高度1 約有 </text:span><text:span text:style-name="T231">n/4</text:span><text:span text:style-name="T230"> 個</text:span>，<text:span text:style-name="T232">每個最多移動 1 步</text:span></text:p>
            <text:p text:style-name="P4"><text:span text:style-name="T230">高度2 約有 </text:span><text:span text:style-name="T231">n/8</text:span><text:span text:style-name="T230"> 個</text:span>，<text:span text:style-name="T232">每個最多移動 2 步</text:span></text:p>
            <text:p text:style-name="P4"><text:span text:style-name="T230">高度3 約有 </text:span><text:span text:style-name="T231">n/16</text:span><text:span text:style-name="T230"> 個</text:span>，<text:span text:style-name="T232">每個最多移動 3 步</text:span></text:p>
            <text:p text:style-name="P4">...</text:p>
            <text:p text:style-name="P4"/>
            <text:p text:style-name="P4">因此總成本為：</text:p>
            <text:p text:style-name="P4"/>
            <text:p text:style-name="P4">T(n) ≈ (n/2)×0</text:p>
            <text:p text:style-name="P4"/>
            <text:p text:style-name="P4">* (n/4)×1</text:p>
            <text:p text:style-name="P4">* (n/8)×2</text:p>
            <text:p text:style-name="P4">* (n/16)×3</text:p>
            <text:p text:style-name="P4">* ...</text:p>
            <text:p text:style-name="P4"/>
            <text:p text:style-name="P4">觀察可知：</text:p>
            <text:p text:style-name="P4"/>
            <text:p text:style-name="P5">越往上，Heapify 可能移動的步數增加 1，</text:p>
            <text:p text:style-name="P4"><text:span text:style-name="T181">但節點數量卻減少一半</text:span>。</text:p>
            <text:p text:style-name="P4"/>
            <text:p text:style-name="P4">例如：</text:p>
            <text:p text:style-name="P4"/>
            <text:p text:style-name="P4">高度1： (<text:span text:style-name="T232">n/4</text:span>)×<text:span text:style-name="T230">1</text:span></text:p>
            <text:p text:style-name="P4">高度2： (<text:span text:style-name="T232">n/8</text:span>)×<text:span text:style-name="T230">2</text:span></text:p>
            <text:p text:style-name="P4">高度3： (<text:span text:style-name="T232">n/16</text:span>)×<text:span text:style-name="T230">3</text:span></text:p>
            <text:p text:style-name="P4"/>
            <text:p text:style-name="P4">可以看到<text:span text:style-name="T141">節點數減少的速度比成本增加的速度更快</text:span>。</text:p>
            <text:p text:style-name="P4"/>
            <text:p text:style-name="P4">因此<text:span text:style-name="T113">所有層的成本加總後不會達到 O(n log n)，而是 O(n)</text:span>。</text:p>
            <text:p text:style-name="P4"/>
            <text:p text:style-name="P4">結論：</text:p>
            <text:p text:style-name="P4"/>
            <text:p text:style-name="P4"><text:span text:style-name="T130">葉節點很多，但幾乎不用移動</text:span>；</text:p>
            <text:p text:style-name="P4"><text:span text:style-name="T182">根附近節點雖然較貴，但數量很少</text:span>。</text:p>
            <text:p text:style-name="P4"/>
            <text:p text:style-name="P4"><text:span text:style-name="T113">所以 </text:span><text:span text:style-name="T183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4"/>
          </table:table-cell>
        </table:table-row>
        <table:table-row table:style-name="表格18.1">
          <table:table-cell table:style-name="表格18.A1" office:value-type="string">
            <text:p text:style-name="P4" loext:marker-style-name="T42"><text:span text:style-name="T60">白話理解：</text:span><text:span text:style-name="T132">葉節點約佔一半，</text:span><text:span text:style-name="T133">Heapify </text:span><text:span text:style-name="T132">代價為 </text:span><text:span text:style-name="T133">0</text:span><text:span text:style-name="T60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4" loext:marker-style-name="T153"><text:span text:style-name="T154">往上每層節點數減半，代價只加 </text:span><text:span text:style-name="T153">1</text:span><text:span text:style-name="T154">。</text:span></text:p>
          </table:table-cell>
        </table:table-row>
        <table:table-row table:style-name="表格18.1">
          <table:table-cell table:style-name="表格18.A1" office:value-type="string">
            <text:p text:style-name="P4" loext:marker-style-name="T42"><text:span text:style-name="T226">整體工作量被大量葉節點的「零代價」攤平</text:span><text:span text:style-name="T60">，總代價 ∝ </text:span><text:span text:style-name="T49">n</text:span><text:span text:style-name="T60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2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 loext:marker-style-name="T155"><text:span text:style-name="T156">逐個 </text:span><text:span text:style-name="T155">Insert</text:span></text:p>
          </table:table-cell>
          <table:table-cell table:style-name="表格19.A2" office:value-type="string">
            <text:p text:style-name="P32" loext:marker-style-name="T42"><text:span text:style-name="T49">O(</text:span><text:span text:style-name="T50">n log n</text:span><text:span text:style-name="T49">)</text:span></text:p>
          </table:table-cell>
          <table:table-cell table:style-name="表格19.A2" office:value-type="string">
            <text:p text:style-name="P32" loext:marker-style-name="T42"><text:span text:style-name="T60">動態逐一加入</text:span><text:span text:style-name="T42"/></text:p>
          </table:table-cell>
        </table:table-row>
        <table:table-row table:style-name="表格19.1">
          <table:table-cell table:style-name="表格19.A3" office:value-type="string">
            <text:p text:style-name="P32" loext:marker-style-name="T155"><text:span text:style-name="T155">Bottom-Up Build Heap</text:span><text:span text:style-name="T155"/></text:p>
          </table:table-cell>
          <table:table-cell table:style-name="表格19.A3" office:value-type="string">
            <text:p text:style-name="P32" loext:marker-style-name="T42"><text:span text:style-name="T49">O(</text:span><text:span text:style-name="T50">n</text:span><text:span text:style-name="T49">) ★</text:span></text:p>
          </table:table-cell>
          <table:table-cell table:style-name="表格19.A3" office:value-type="string">
            <text:p text:style-name="P32" loext:marker-style-name="T42"><text:span text:style-name="T60">一次性建立</text:span><text:span text:style-name="T42"/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五、</text:span><text:span text:style-name="T10">Heap Sort</text:span><text:span text:style-name="T4">（堆積排序）</text:span></text:h>
      <text:p text:style-name="P33" loext:marker-style-name="T30"><text:span text:style-name="T48">Heap Sort </text:span><text:span text:style-name="T31">利用 </text:span><text:span text:style-name="T48">Heap </text:span><text:span text:style-name="T31">結構進行排序，分為兩個階段：</text:span></text:p>
      <text:p text:style-name="P1"/>
      <text:list xml:id="list3819085238" text:style-name="WWNum2">
        <text:list-item>
          <text:p text:style-name="P40" loext:marker-style-name="T30"><text:span text:style-name="T48">Phase 1</text:span><text:span text:style-name="T31">：</text:span><text:span text:style-name="T143">Build Heap</text:span><text:span text:style-name="T48"> — </text:span><text:span text:style-name="T233">將原始陣列建成 </text:span><text:span text:style-name="T234">Max Heap</text:span><text:span text:style-name="T31">，時間 </text:span><text:span text:style-name="T48">O(n)</text:span><text:span text:style-name="T31">。</text:span></text:p>
        </text:list-item>
        <text:list-item>
          <text:p text:style-name="P40" loext:marker-style-name="T30"><text:span text:style-name="T48">Phase 2</text:span><text:span text:style-name="T31">：</text:span><text:span text:style-name="T83">反覆 </text:span><text:span text:style-name="T109">Extract-Max</text:span><text:span text:style-name="T48"> — </text:span><text:span text:style-name="T67">取出 </text:span><text:span text:style-name="T74">Root</text:span><text:span text:style-name="T67">（最大值），放到陣列末端</text:span><text:span text:style-name="T31">，</text:span><text:span text:style-name="T33">再 </text:span><text:span text:style-name="T45">Heapify</text:span><text:span text:style-name="T31">，重複 </text:span><text:span text:style-name="T47">n-1</text:span><text:span text:style-name="T48"> </text:span><text:span text:style-name="T31">次，每次 </text:span><text:span text:style-name="T48">O(</text:span><text:span text:style-name="T174">log n</text:span><text:span text:style-name="T48">)</text:span><text:span text:style-name="T31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" loext:marker-style-name="T42"><text:span text:style-name="T49">Heap Sort </text:span><text:span text:style-name="T60">總時間 </text:span><text:span text:style-name="T49">= O(</text:span><text:span text:style-name="T50">n</text:span><text:span text:style-name="T49">) + O(</text:span><text:span text:style-name="T50">n log n</text:span><text:span text:style-name="T49">) = O(</text:span><text:span text:style-name="T168">n log n</text:span><text:span text:style-name="T49">)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2"><text:span text:style-name="T60">空間複雜度 </text:span><text:span text:style-name="T49">= O(1)</text:span><text:span text:style-name="T60">（</text:span><text:span text:style-name="T49">In-place</text:span><text:span text:style-name="T60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2"><text:span text:style-name="T60">穩定性 </text:span><text:span text:style-name="T49">= </text:span><text:span text:style-name="T60">不穩定（</text:span><text:span text:style-name="T49">Unstable</text:span><text:span text:style-name="T60">）</text:span></text:p>
          </table:table-cell>
        </table:table-row>
      </table:table>
      <text:p text:style-name="P1"/>
      <text:p text:style-name="P33" loext:marker-style-name="T30"><text:span text:style-name="T32">範例：對 </text:span><text:span text:style-name="T46">[4, 2, 7, 1, 5] </text:span><text:span text:style-name="T32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" loext:marker-style-name="T42"><text:span text:style-name="T49">Phase 1 — </text:span><text:span text:style-name="T155">Build Max Heap</text:span><text:span text:style-name="T60">：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60">原始：</text:span><text:span text:style-name="T49">[4, 2, 7, 1, 5]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50">n=5</text:span><text:span text:style-name="T60">，</text:span><text:span text:style-name="T116">最後非葉節點 </text:span><text:span text:style-name="T115">= </text:span><text:span text:style-name="T104">⌊5/2⌋ = 2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60">初始樹狀：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8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5"/></text:span><text:span text:style-name="T104"><text:s/>2</text:span><text:span text:style-name="T49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4"/>1 <text:s text:c="2"/>5</text:span><text:span text:style-name="T42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151">Heapify(2)</text:span><text:span text:style-name="T60">：</text:span><text:span text:style-name="T50">2 </text:span><text:span text:style-name="T51">的子節點 </text:span><text:span text:style-name="T50">1, 5</text:span><text:span text:style-name="T60">；</text:span><text:span text:style-name="T168">5 &gt; 2 → </text:span><text:span text:style-name="T169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8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6"/>5 <text:s text:c="2"/>7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4"/>1 <text:s text:c="2"/>2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151">Heapify(1)</text:span><text:span text:style-name="T60">：</text:span><text:span text:style-name="T50">4 </text:span><text:span text:style-name="T51">的子節點 </text:span><text:span text:style-name="T50">5, 7</text:span><text:span text:style-name="T60">；</text:span><text:span text:style-name="T168">7 &gt; 4 → </text:span><text:span text:style-name="T169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8"/>7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6"/>5 <text:s text:c="2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<text:s text:c="4"/>1 <text:s text:c="2"/>2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2"><text:span text:style-name="T49">Max Heap </text:span><text:span text:style-name="T60">完成：</text:span><text:span text:style-name="T49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" loext:marker-style-name="T42"><text:span text:style-name="T49">Phase 2 — </text:span><text:span text:style-name="T205">反覆</text:span><text:span text:style-name="T60"> </text:span><text:span text:style-name="T104">Extract-Max</text:span><text:span text:style-name="T60">：</text:span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Step 1</text:span><text:span text:style-name="T60">：</text:span><text:span text:style-name="T62">取出 </text:span><text:span text:style-name="T63">Root=7</text:span><text:span text:style-name="T62">，末端 </text:span><text:span text:style-name="T63">2 </text:span><text:span text:style-name="T62">移到 </text:span><text:span text:style-name="T63">Root</text:span><text:span text:style-name="T60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2"/>→ [5, 2, 4, 1 |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8"/>5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7"/>/ \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6"/>2 <text:s text:c="2"/>4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5"/>/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4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Step 2</text:span><text:span text:style-name="T60">：</text:span><text:span text:style-name="T62">取出 </text:span><text:span text:style-name="T63">Root=5</text:span><text:span text:style-name="T62">，末端 </text:span><text:span text:style-name="T63">1 </text:span><text:span text:style-name="T62">移到 </text:span><text:span text:style-name="T63">Root</text:span><text:span text:style-name="T60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2"/>→ [4, 2, 1 |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8"/>4</text:span><text:span text:style-name="T42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4" loext:marker-style-name="T42"><text:span text:style-name="T49"><text:s text:c="7"/>/ \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6"/>2 <text:s text:c="2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Step 3</text:span><text:span text:style-name="T60">：</text:span><text:span text:style-name="T62">取出 </text:span><text:span text:style-name="T63">Root=4</text:span><text:span text:style-name="T62">，末端 </text:span><text:span text:style-name="T63">1 </text:span><text:span text:style-name="T62">移到 </text:span><text:span text:style-name="T63">Root</text:span><text:span text:style-name="T60">，</text:span><text:span text:style-name="T58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2"/>→ [2, 1 | 4,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8"/>2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7"/>/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6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Step 4</text:span><text:span text:style-name="T60">：</text:span><text:span text:style-name="T62">取出 </text:span><text:span text:style-name="T63">Root=2</text:span><text:span text:style-name="T62">，末端 </text:span><text:span text:style-name="T63">1 </text:span><text:span text:style-name="T62">移到 </text:span><text:span text:style-name="T63">Root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2"/>→ [1 | 2, 4,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2"><text:span text:style-name="T49"><text:s text:c="8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203"><text:span text:style-name="T204">最終排序（升冪）：</text:span><text:span text:style-name="T203">[1, 2, 4, 5, 7] ✓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3" loext:marker-style-name="T30"><text:span text:style-name="T74">Priority Queue</text:span><text:span text:style-name="T67">（優先佇列）</text:span><text:span text:style-name="T31">是</text:span><text:span text:style-name="T145">每次取出「優先值最高」元素的資料結構</text:span><text:span text:style-name="T31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2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6"><text:span text:style-name="T235">Extract-Max</text:span><text:span text:style-name="T237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2" loext:marker-style-name="T42"><text:span text:style-name="T156">排序好的</text:span><text:span text:style-name="T60">陣列</text:span></text:p>
          </table:table-cell>
          <table:table-cell table:style-name="表格23.A2" office:value-type="string">
            <text:p text:style-name="P32" loext:marker-style-name="T42"><text:span text:style-name="T49">O(n)</text:span><text:span text:style-name="T42"/></text:p>
          </table:table-cell>
          <table:table-cell table:style-name="表格23.A2" office:value-type="string">
            <text:p text:style-name="P32" loext:marker-style-name="T42"><text:span text:style-name="T49">O(1) <text:s/></text:span><text:span text:style-name="T60">取快插慢</text:span></text:p>
          </table:table-cell>
        </table:table-row>
        <table:table-row table:style-name="表格23.1">
          <table:table-cell table:style-name="表格23.A2" office:value-type="string">
            <text:p text:style-name="P32" loext:marker-style-name="T42"><text:span text:style-name="T156">未排序的</text:span><text:span text:style-name="T60">陣列</text:span></text:p>
          </table:table-cell>
          <table:table-cell table:style-name="表格23.A2" office:value-type="string">
            <text:p text:style-name="P32" loext:marker-style-name="T42"><text:span text:style-name="T49">O(1)</text:span><text:span text:style-name="T42"/></text:p>
          </table:table-cell>
          <table:table-cell table:style-name="表格23.A2" office:value-type="string">
            <text:p text:style-name="P32" loext:marker-style-name="T42"><text:span text:style-name="T49">O(n) <text:s/></text:span><text:span text:style-name="T60">插快取慢</text:span></text:p>
          </table:table-cell>
        </table:table-row>
        <table:table-row table:style-name="表格23.1">
          <table:table-cell table:style-name="表格23.A4" office:value-type="string">
            <text:p text:style-name="P32" loext:marker-style-name="T42"><text:span text:style-name="T49">Max Heap ★</text:span><text:span text:style-name="T42"/></text:p>
          </table:table-cell>
          <table:table-cell table:style-name="表格23.A4" office:value-type="string">
            <text:p text:style-name="P32" loext:marker-style-name="T168"><text:span text:style-name="T168">O(log n)</text:span><text:span text:style-name="T168"/></text:p>
          </table:table-cell>
          <table:table-cell table:style-name="表格23.A4" office:value-type="string">
            <text:p text:style-name="P32" loext:marker-style-name="T42"><text:span text:style-name="T151">O(log n)</text:span><text:span text:style-name="T49"> <text:s/></text:span><text:span text:style-name="T60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" loext:marker-style-name="T42"><text:span text:style-name="T49">💡 </text:span><text:span text:style-name="T60">考試重點：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2"><text:span text:style-name="T104">Heap </text:span><text:span text:style-name="T105">是 </text:span><text:span text:style-name="T104">Priority Queue </text:span><text:span text:style-name="T105">最常見的實作</text:span><text:span text:style-name="T60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2"><text:span text:style-name="T60">原因是 </text:span><text:span text:style-name="T168">Insert </text:span><text:span text:style-name="T169">和 </text:span><text:span text:style-name="T168">Extract </text:span><text:span text:style-name="T169">都是 </text:span><text:span text:style-name="T168">O(log n)</text:span><text:span text:style-name="T60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2"><text:span text:style-name="T60">是</text:span><text:span text:style-name="T204">三種方案中最均衡的折衷解</text:span><text:span text:style-name="T60">。</text:span></text:p>
          </table:table-cell>
        </table:table-row>
        <table:table-row table:style-name="表格24.1">
          <table:table-cell table:style-name="表格24.A1" office:value-type="string">
            <text:p text:style-name="P4"/>
          </table:table-cell>
        </table:table-row>
        <table:table-row table:style-name="表格24.1">
          <table:table-cell table:style-name="表格24.A1" office:value-type="string">
            <text:p text:style-name="P4" loext:marker-style-name="T42"><text:span text:style-name="T60">應用場景：印表機緩衝（高優先文件先印）、作業系統 </text:span><text:span text:style-name="T49">CPU </text:span><text:span text:style-name="T60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" loext:marker-style-name="T42"><text:span text:style-name="T49">① </text:span><text:span text:style-name="T156">排序好的</text:span><text:span text:style-name="T60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Insert 50</text:span><text:span text:style-name="T60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Before: <text:s/>[10, 30, 70, 8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</text:span><text:span text:style-name="T60">挪動 </text:span><text:span text:style-name="T49">70, 80 </text:span><text:span text:style-name="T60">後</text:span><text:span text:style-name="T49">: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After: <text:s text:c="2"/>[10, 30, </text:span><text:span text:style-name="T54">50</text:span><text:span text:style-name="T49">, 70, 80] <text:s text:c="2"/>← </text:span><text:span text:style-name="T50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Extract-Max</text:span><text:span text:style-name="T60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Before: <text:s/>[10, 30, 50, 70, 8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After: <text:s text:c="2"/>[10, 30, 50, 70] <text:s text:c="2"/></text:span><text:span text:style-name="T60">取出 </text:span><text:span text:style-name="T49">80 <text:s text:c="2"/>←</text:span><text:span text:style-name="T50"> 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② </text:span><text:span text:style-name="T156">未排序的</text:span><text:span text:style-name="T60">陣列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Insert 50</text:span><text:span text:style-name="T60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Before: <text:s/>[80, 10, 30, 7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After: <text:s text:c="2"/>[80, 10, 30, 70, 50] <text:s text:c="2"/>← </text:span><text:span text:style-name="T50">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Extract-Max</text:span><text:span text:style-name="T60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Before: <text:s/>[80, 10, 30, 70, 5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</text:span><text:span text:style-name="T60">掃描</text:span><text:span text:style-name="T49">: 80? 10? 30? 70? 50? <text:s/>→ </text:span><text:span text:style-name="T60">找到 </text:span><text:span text:style-name="T49">80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After: <text:s text:c="2"/>[10, 30, 70, 50] <text:s text:c="2"/></text:span><text:span text:style-name="T60">取出 </text:span><text:span text:style-name="T49">80 <text:s text:c="2"/>← </text:span><text:span text:style-name="T50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③ Max Heap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Insert 50</text:span><text:span text:style-name="T60">：放末端，</text:span><text:span text:style-name="T49">Bubble Up </text:span><text:span text:style-name="T60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9"/>80 <text:s text:c="16"/>8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9"/>/ <text:s/>\ <text:s text:c="15"/>/ <text:s text:c="2"/>\</text:span><text:span text:style-name="T42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4" loext:marker-style-name="T42"><text:span text:style-name="T49"><text:s text:c="6"/>70 <text:s text:c="2"/>30 <text:s text:c="3"/>→ <text:s/>70 <text:s text:c="2"/>3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6"/>/ <text:s text:c="18"/>/ <text:s text:c="2"/>\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4"/>10 <text:s text:c="14"/>10 <text:s text:c="2"/>50 ← </text:span><text:span text:style-name="T203">50 </text:span><text:span text:style-name="T204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61"/></text:span><text:span text:style-name="T168">O(log 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35" office:value-type="string">
            <text:p text:style-name="P4"><text:span text:style-name="T49">Extract-Max</text:span><text:span text:style-name="T60">：</text:span><text:span text:style-name="T70">取出 </text:span><text:span text:style-name="T71">Root=80</text:span><text:span text:style-name="T60">，</text:span><text:span text:style-name="T225">末端</text:span><text:span text:style-name="T179"> </text:span><text:span text:style-name="T180">50 </text:span><text:span text:style-name="T225">補位</text:span><text:span text:style-name="T60">，</text:span><text:span text:style-name="T49">Heapify </text:span><text:span text:style-name="T60">往下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9"/>80 <text:s text:c="16"/>50 <text:s text:c="17"/>7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8"/>/ <text:s text:c="2"/>\ <text:s text:c="15"/>/ <text:s text:c="2"/>\ <text:s text:c="16"/>/ <text:s text:c="2"/>\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5"/>70 <text:s text:c="2"/>30 <text:s text:c="2"/>→ <text:s text:c="3"/>70 <text:s text:c="2"/>30 <text:s text:c="3"/>→ <text:s text:c="3"/>50 <text:s text:c="2"/>3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5"/>/ <text:s text:c="2"/>\ <text:s text:c="15"/>/ <text:s text:c="20"/>/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2"/>10 <text:s text:c="2"/>50 <text:s text:c="9"/>10 <text:s text:c="18"/>1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3"/></text:span><text:span text:style-name="T60">取出 </text:span><text:span text:style-name="T49">80 <text:s text:c="5"/>50 </text:span><text:span text:style-name="T60">移到 </text:span><text:span text:style-name="T49">Root <text:s text:c="4"/>Heapify </text:span><text:span text:style-name="T60">完成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2"><text:span text:style-name="T49"><text:s text:c="57"/></text:span><text:span text:style-name="T168">O(log n)</text:span></text:p>
          </table:table-cell>
        </table:table-row>
      </table:table>
      <text:p text:style-name="P1"/>
      <text:h text:style-name="P2" text:outline-level="1" loext:marker-style-name="T243"><text:span text:style-name="T244">七、</text:span><text:span text:style-name="T243">Interval Heap</text:span><text:span text:style-name="T244">（區間堆積）【</text:span><text:span text:style-name="T243">110</text:span><text:span text:style-name="T244">地</text:span><text:span text:style-name="T243">Q4</text:span><text:span text:style-name="T244">】</text:span></text:h>
      <text:h text:style-name="P3" text:outline-level="2" loext:marker-style-name="T20"><text:span text:style-name="T20">7-1 <text:s/></text:span><text:span text:style-name="T21">問題起源：</text:span><text:span text:style-name="T22">普通 </text:span><text:span text:style-name="T24">Heap</text:span><text:span text:style-name="T20"> </text:span><text:span text:style-name="T200">只能快速取一端</text:span></text:h>
      <text:p text:style-name="P7" loext:marker-style-name="T247"><text:span text:style-name="T248">回顧你已學過的 </text:span><text:span text:style-name="T247">Max Heap</text:span><text:span text:style-name="T248">：</text:span></text:p>
      <text:p text:style-name="P42" loext:marker-style-name="T283"><text:span text:style-name="T283"><text:s text:c="11"/>100 <text:s text:c="6"/>← </text:span><text:span text:style-name="T284">Root</text:span><text:span text:style-name="T283"> = 全域最大值（</text:span><text:span text:style-name="T284">O(1) 取得</text:span><text:span text:style-name="T283">）</text:span></text:p>
      <text:p text:style-name="P9"><text:s text:c="10"/>/ <text:s text:c="3"/>\</text:p>
      <text:p text:style-name="P8" loext:marker-style-name="T283"><text:span text:style-name="T283"><text:s text:c="8"/>90 <text:s text:c="5"/>80</text:span><text:span text:style-name="T283"/></text:p>
      <text:p text:style-name="P8" loext:marker-style-name="T283"><text:span text:style-name="T283"><text:s text:c="7"/>/ <text:s/>\</text:span><text:span text:style-name="T283"/></text:p>
      <text:p text:style-name="P8" loext:marker-style-name="T283"><text:span text:style-name="T283"><text:s text:c="6"/>70 <text:s text:c="2"/>60</text:span><text:span text:style-name="T283"/></text:p>
      <text:p text:style-name="P8"/>
      <text:p text:style-name="P8" loext:marker-style-name="T283"><text:span text:style-name="T283"><text:s text:c="2"/>Find-Max <text:s/>= O(1) <text:s/>直接</text:span><text:span text:style-name="T284">看 Root</text:span></text:p>
      <text:p text:style-name="P44" loext:marker-style-name="T283"><text:span text:style-name="T283"><text:s text:c="2"/></text:span><text:span text:style-name="T75">Find-Min <text:s/>= O(n)</text:span><text:span text:style-name="T283"> <text:s/></text:span><text:span text:style-name="T286">最小值藏在某個葉節點，不知在哪，</text:span><text:span text:style-name="T229">只能全掃</text:span></text:p>
      <text:p text:style-name="P11"/>
      <text:p text:style-name="P7" loext:marker-style-name="T247"><text:span text:style-name="T247">Max Heap </text:span><text:span text:style-name="T248">有一個致命弱點：</text:span></text:p>
      <text:list text:style-name="WWNum14">
        <text:list-item>
          <text:p text:style-name="P29" loext:marker-style-name="T247"><text:span text:style-name="T248">取最大值 → </text:span><text:span text:style-name="T247">O(1)</text:span><text:span text:style-name="T248">，非常快，因為 </text:span><text:span text:style-name="T247">Root </text:span><text:span text:style-name="T248">就是最大值。</text:span></text:p>
        </text:list-item>
        <text:list-item>
          <text:p text:style-name="P29" loext:marker-style-name="T247"><text:span text:style-name="T68">取最小值 → </text:span><text:span text:style-name="T69">O(n)</text:span><text:span text:style-name="T248">，</text:span><text:span text:style-name="T84">非常慢，因為最小值可能藏在任何一個葉節點，沒有規律可循。</text:span></text:p>
        </text:list-item>
      </text:list>
      <text:p text:style-name="P11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 loext:marker-style-name="T249"><text:span text:style-name="T249">❓ </text:span><text:span text:style-name="T250">想一想：最小值在哪裡？</text:span></text:p>
            <text:p text:style-name="P11" loext:marker-style-name="T264"><text:span text:style-name="T265">以上面的 </text:span><text:span text:style-name="T264">Max Heap </text:span><text:span text:style-name="T265">為例，最小值 </text:span><text:span text:style-name="T264">60 </text:span><text:span text:style-name="T265">藏在葉節點。</text:span></text:p>
            <text:p text:style-name="P46" loext:marker-style-name="T264"><text:span text:style-name="T265">如果樹有 </text:span><text:span text:style-name="T264">n </text:span><text:span text:style-name="T265">個節點，不掃到最後一層根本不知道最小值在哪。</text:span></text:p>
          </table:table-cell>
        </table:table-row>
      </table:table>
      <text:p text:style-name="P12"><text:soft-page-break/></text:p>
      <text:h text:style-name="P3" text:outline-level="2" loext:marker-style-name="T20"><text:span text:style-name="T20">7-2 <text:s/></text:span><text:span text:style-name="T22">現實需求</text:span><text:span text:style-name="T21">：</text:span><text:span text:style-name="T200">兩端都要快</text:span></text:h>
      <text:p text:style-name="P7" loext:marker-style-name="T247"><text:span text:style-name="T248">在</text:span><text:span text:style-name="T251">很多實際應用中</text:span><text:span text:style-name="T248">，我們</text:span><text:span text:style-name="T147">同時需要快速取出最大值和最小值</text:span><text:span text:style-name="T248">：</text:span></text:p>
      <text:p text:style-name="P11"/>
      <text:p text:style-name="P42" loext:marker-style-name="T283"><text:span text:style-name="T283"><text:s text:c="2"/>📈 股票交易系統：</text:span><text:span text:style-name="T283"/></text:p>
      <text:p text:style-name="P8" loext:marker-style-name="T283"><text:span text:style-name="T283"><text:s text:c="7"/>→ 最高價（最大值）O(1) 快速取得</text:span><text:span text:style-name="T283"/></text:p>
      <text:p text:style-name="P8" loext:marker-style-name="T283"><text:span text:style-name="T283"><text:s text:c="7"/>→ 最低價（最小值）O(1) 快速取得</text:span><text:span text:style-name="T283"/></text:p>
      <text:p text:style-name="P8"/>
      <text:p text:style-name="P8" loext:marker-style-name="T283"><text:span text:style-name="T283"><text:s text:c="2"/>🖥️ <text:s/>CPU 排程器（雙優先權模式）：</text:span><text:span text:style-name="T283"/></text:p>
      <text:p text:style-name="P8" loext:marker-style-name="T283"><text:span text:style-name="T283"><text:s text:c="7"/>→ 最高優先權工作 <text:s/>→ 優先執行</text:span><text:span text:style-name="T283"/></text:p>
      <text:p text:style-name="P8" loext:marker-style-name="T283"><text:span text:style-name="T283"><text:s text:c="7"/>→ 最低優先權工作 <text:s/>→ 必要時踢出讓位</text:span><text:span text:style-name="T283"/></text:p>
      <text:p text:style-name="P8"/>
      <text:p text:style-name="P8" loext:marker-style-name="T283"><text:span text:style-name="T283"><text:s text:c="2"/>❌ </text:span><text:span text:style-name="T284">普通 Max Heap</text:span><text:span text:style-name="T283"> 做不到：</text:span><text:span text:style-name="T175">找最小值要</text:span><text:span text:style-name="T229"> O(n)</text:span></text:p>
      <text:p text:style-name="P44" loext:marker-style-name="T283"><text:span text:style-name="T283"><text:s text:c="2"/>❌ </text:span><text:span text:style-name="T284">普通 Min Heap</text:span><text:span text:style-name="T283"> 做不到：</text:span><text:span text:style-name="T175">找最大值要</text:span><text:span text:style-name="T229"> O(n)</text:span></text:p>
      <text:p text:style-name="P11"/>
      <text:p text:style-name="P7" loext:marker-style-name="T247"><text:span text:style-name="T248">這類需求稱為 </text:span><text:span text:style-name="T247">Double-Ended Priority Queue</text:span><text:span text:style-name="T248">（</text:span><text:span text:style-name="T247">DEPQ</text:span><text:span text:style-name="T248">，</text:span><text:span text:style-name="T123">雙端優先佇列</text:span><text:span text:style-name="T248">），</text:span><text:span text:style-name="T84">目標是</text:span><text:span text:style-name="T24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1" loext:marker-style-name="T249"><text:span text:style-name="T249">Extract-Min</text:span><text:span text:style-name="T250">（</text:span><text:span text:style-name="T201">取出最小值</text:span><text:span text:style-name="T250">）</text:span><text:span text:style-name="T249">= </text:span><text:span text:style-name="T202">O(log n)</text:span></text:p>
            <text:p text:style-name="P46" loext:marker-style-name="T249"><text:span text:style-name="T249">Extract-Max</text:span><text:span text:style-name="T250">（</text:span><text:span text:style-name="T201">取出最大值</text:span><text:span text:style-name="T250">）</text:span><text:span text:style-name="T249">= </text:span><text:span text:style-name="T202">O(log n)</text:span></text:p>
          </table:table-cell>
        </table:table-row>
      </table:table>
      <text:p text:style-name="P12"/>
      <text:h text:style-name="P3" text:outline-level="2" loext:marker-style-name="T20"><text:span text:style-name="T20">7-3 <text:s/>Interval Heap </text:span><text:span text:style-name="T21">的核心設計</text:span></text:h>
      <text:p text:style-name="P7" loext:marker-style-name="T247"><text:span text:style-name="T255">Interval Heap </text:span><text:span text:style-name="T256">的靈感</text:span><text:span text:style-name="T248">：</text:span><text:span text:style-name="T84">把 </text:span><text:span text:style-name="T86">Min Heap </text:span><text:span text:style-name="T84">和 </text:span><text:span text:style-name="T86">Max Heap</text:span><text:span text:style-name="T214">「疊」在同一棵樹上</text:span><text:span text:style-name="T248">。</text:span></text:p>
      <text:p text:style-name="P7" loext:marker-style-name="T247"><text:span text:style-name="T270">具體做法：</text:span><text:span text:style-name="T172">每個節點不再存一個值</text:span><text:span text:style-name="T248">，</text:span><text:span text:style-name="T147">改成存一個「區間」</text:span><text:span text:style-name="T148">[min_val, max_val]</text:span><text:span text:style-name="T248">：</text:span></text:p>
      <text:p text:style-name="P42" loext:marker-style-name="T283"><text:span text:style-name="T283"><text:s text:c="2"/></text:span><text:span text:style-name="T285">普通</text:span><text:span text:style-name="T283"> Heap 節點： <text:s text:c="9"/>Interval Heap 節點：</text:span></text:p>
      <text:p text:style-name="P8" loext:marker-style-name="T283"><text:span text:style-name="T283"><text:s text:c="7"/></text:span><text:span text:style-name="T284">80</text:span><text:span text:style-name="T283"> <text:s text:c="23"/></text:span><text:span text:style-name="T284">[20, 80]</text:span></text:p>
      <text:p text:style-name="P9"><text:s text:c="34"/>左值 <text:s/>右值</text:p>
      <text:p text:style-name="P8" loext:marker-style-name="T283"><text:span text:style-name="T283"><text:s text:c="30"/>（小的） <text:s/>（大的）</text:span><text:span text:style-name="T283"/></text:p>
      <text:p text:style-name="P8"/>
      <text:p text:style-name="P44" loext:marker-style-name="T283"><text:span text:style-name="T283"><text:s text:c="2"/>規則：</text:span><text:span text:style-name="T288">每個節點的 左值 ≤ 右值</text:span><text:span text:style-name="T289"> </text:span><text:span text:style-name="T283">（必須成立）</text:span></text:p>
      <text:p text:style-name="P11"/>
      <text:p text:style-name="P7" loext:marker-style-name="T247"><text:span text:style-name="T257">兩個 </text:span><text:span text:style-name="T258">Heap </text:span><text:span text:style-name="T257">的同時維護</text:span><text:span text:style-name="T248">：</text:span></text:p>
      <text:list text:continue-numbering="true" text:style-name="WWNum14">
        <text:list-item>
          <text:p text:style-name="P29" loext:marker-style-name="T247"><text:span text:style-name="T251">所有節點的</text:span><text:span text:style-name="T135">左</text:span><text:span text:style-name="T251">值（</text:span><text:span text:style-name="T253">min </text:span><text:span text:style-name="T251">端）</text:span><text:span text:style-name="T248">— 自上而下形成一個 </text:span><text:span text:style-name="T136">Min Heap</text:span></text:p>
        </text:list-item>
        <text:list-item>
          <text:p text:style-name="P29" loext:marker-style-name="T247"><text:span text:style-name="T251">所有節點的</text:span><text:span text:style-name="T159">右</text:span><text:span text:style-name="T251">值（</text:span><text:span text:style-name="T253">max </text:span><text:span text:style-name="T251">端</text:span><text:span text:style-name="T248">）— 自上而下形成一個 </text:span><text:span text:style-name="T160">Max Heap</text:span></text:p>
        </text:list-item>
      </text:list>
      <text:p text:style-name="P11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" loext:marker-style-name="T249"><text:span text:style-name="T249">Interval Heap = </text:span><text:span text:style-name="T137">Min Heap</text:span><text:span text:style-name="T138">（左值）</text:span><text:span text:style-name="T249">+</text:span><text:span text:style-name="T160"> Max Heap</text:span><text:span text:style-name="T161">（右值）</text:span><text:span text:style-name="T290">同時疊在一棵樹上</text:span></text:p>
          </table:table-cell>
        </table:table-row>
      </table:table>
      <text:p text:style-name="P12"/>
      <text:h text:style-name="P3" text:outline-level="2" loext:marker-style-name="T20"><text:span text:style-name="T20">7-4 <text:s/></text:span><text:span text:style-name="T21">整棵樹的結構解析</text:span></text:h>
      <text:p text:style-name="P42" loext:marker-style-name="T283"><text:span text:style-name="T283"><text:s text:c="14"/>[</text:span><text:span text:style-name="T285">10</text:span><text:span text:style-name="T283">, </text:span><text:span text:style-name="T157">100</text:span><text:span text:style-name="T283">] <text:s text:c="9"/>← Root</text:span></text:p>
      <text:p text:style-name="P8" loext:marker-style-name="T283"><text:span text:style-name="T283"><text:s text:c="13"/>/ <text:s text:c="9"/>\</text:span><text:span text:style-name="T283"/></text:p>
      <text:p text:style-name="P44" loext:marker-style-name="T283"><text:soft-page-break/><text:span text:style-name="T283"><text:s text:c="8"/>[</text:span><text:span text:style-name="T285">20</text:span><text:span text:style-name="T283">, </text:span><text:span text:style-name="T157">80</text:span><text:span text:style-name="T283">] <text:s text:c="5"/>[</text:span><text:span text:style-name="T285">30</text:span><text:span text:style-name="T283">, </text:span><text:span text:style-name="T157">90</text:span><text:span text:style-name="T283">]</text:span></text:p>
      <text:p text:style-name="P11"/>
      <text:p text:style-name="P7" loext:marker-style-name="T247"><text:span text:style-name="T248">拆開來看左右兩個 </text:span><text:span text:style-name="T247">Heap</text:span><text:span text:style-name="T248">：</text:span></text:p>
      <text:p text:style-name="P42" loext:marker-style-name="T283"><text:span text:style-name="T283"><text:s text:c="2"/></text:span><text:span text:style-name="T287">左值（min 端）形成 Min Heap</text:span><text:span text:style-name="T283">： <text:s text:c="2"/></text:span><text:span text:style-name="T207">右值（max 端）形成 Max Heap</text:span><text:span text:style-name="T283">：</text:span></text:p>
      <text:p text:style-name="P8"/>
      <text:p text:style-name="P8" loext:marker-style-name="T283"><text:span text:style-name="T283"><text:s text:c="10"/>10 <text:s text:c="30"/>100</text:span><text:span text:style-name="T283"/></text:p>
      <text:p text:style-name="P8" loext:marker-style-name="T283"><text:span text:style-name="T283"><text:s text:c="9"/>/ <text:s/>\ <text:s text:c="28"/>/ <text:s text:c="3"/>\</text:span><text:span text:style-name="T283"/></text:p>
      <text:p text:style-name="P8" loext:marker-style-name="T283"><text:span text:style-name="T283"><text:s text:c="8"/>20 <text:s/>30 <text:s text:c="26"/>80 <text:s text:c="4"/>90</text:span><text:span text:style-name="T283"/></text:p>
      <text:p text:style-name="P8"/>
      <text:p text:style-name="P44" loext:marker-style-name="T283"><text:span text:style-name="T283"><text:s text:c="2"/>驗證 Min Heap：10 ≤ 20 ✓ <text:s/>10 ≤ 30 ✓ <text:s text:c="2"/>驗證 Max Heap：100 ≥ 80 ✓ <text:s/>100 ≥ 90 ✓</text:span><text:span text:style-name="T283"/></text:p>
      <text:p text:style-name="P11"/>
      <text:p text:style-name="P7" loext:marker-style-name="T247"><text:span text:style-name="T248">因此：</text:span><text:span text:style-name="T247"/></text:p>
      <text:list text:continue-numbering="true" text:style-name="WWNum14">
        <text:list-item>
          <text:p text:style-name="P29" loext:marker-style-name="T247"><text:span text:style-name="T253">Root </text:span><text:span text:style-name="T251">的</text:span><text:span text:style-name="T135">左</text:span><text:span text:style-name="T251">值</text:span><text:span text:style-name="T248"> </text:span><text:span text:style-name="T247">= </text:span><text:span text:style-name="T139">Min</text:span><text:span text:style-name="T247"> Heap </text:span><text:span text:style-name="T248">的 </text:span><text:span text:style-name="T247">Root = </text:span><text:span text:style-name="T291">全域最小值</text:span><text:span text:style-name="T248"> </text:span><text:span text:style-name="T247">= 10 <text:s/>→</text:span><text:span text:style-name="T186"> <text:s/>Find-Min = O(1)</text:span></text:p>
        </text:list-item>
        <text:list-item>
          <text:p text:style-name="P29" loext:marker-style-name="T247"><text:span text:style-name="T253">Root </text:span><text:span text:style-name="T251">的</text:span><text:span text:style-name="T159">右</text:span><text:span text:style-name="T251">值</text:span><text:span text:style-name="T248"> </text:span><text:span text:style-name="T247">= </text:span><text:span text:style-name="T162">Max</text:span><text:span text:style-name="T247"> Heap </text:span><text:span text:style-name="T248">的 </text:span><text:span text:style-name="T247">Root = </text:span><text:span text:style-name="T292">全域最大值</text:span><text:span text:style-name="T248"> </text:span><text:span text:style-name="T247">= 100 <text:s/>→ </text:span><text:span text:style-name="T186"><text:s/>Find-Max = O(1)</text:span></text:p>
        </text:list-item>
      </text:list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1" loext:marker-style-name="T249"><text:span text:style-name="T249">🎯 Interval Heap </text:span><text:span text:style-name="T250">的核心價值</text:span></text:p>
            <text:p text:style-name="P11" loext:marker-style-name="T264"><text:span text:style-name="T149">Root </text:span><text:span text:style-name="T150">節點</text:span><text:span text:style-name="T201">同時持有全域最小值（左值）和全域最大值（右值）</text:span><text:span text:style-name="T265">，</text:span></text:p>
            <text:p text:style-name="P46" loext:marker-style-name="T264"><text:span text:style-name="T259">無論取哪一端</text:span><text:span text:style-name="T265">，</text:span><text:span text:style-name="T84">都能 </text:span><text:span text:style-name="T86">O(1) </text:span><text:span text:style-name="T84">找到、</text:span><text:span text:style-name="T187">O(log n) </text:span><text:span text:style-name="T188">取出</text:span><text:span text:style-name="T84">。</text:span></text:p>
          </table:table-cell>
        </table:table-row>
      </table:table>
      <text:p text:style-name="P12"/>
      <text:h text:style-name="P18" text:outline-level="2" loext:marker-style-name="T17"><text:span text:style-name="T18">7-4.5 <text:s/></text:span><text:span text:style-name="T173">Find 找到 vs. Extract 取出</text:span><text:span text:style-name="T18">：</text:span><text:span text:style-name="T221">為何一個 O(1)、一個 O(log n)</text:span><text:span text:style-name="T18">？</text:span></text:h>
      <text:p text:style-name="P33" loext:marker-style-name="T293"><text:span text:style-name="T294">這是很多人第一次接觸 Heap 時最容易混淆的地方。關鍵在於：</text:span><text:span text:style-name="T129">「找到（Find/Peek）」和「取出（Extract/Delete）」是完全不同的兩件事。</text:span></text:p>
      <text:p text:style-name="P12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4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11"/>100 <text:s text:c="2"/>← Root = 全域最大值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10"/>/ <text:s text:c="2"/>\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8"/>90 <text:s text:c="3"/>80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7"/>/ \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5"/>70 <text:s/>60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Find-Max（找最大值）= O(1)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2"/>→ 直接讀 Root，什麼都不用動。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Extract-Max（取出最大值）= O(log n)</text:span><text:span text:style-name="T42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4" loext:marker-style-name="T42"><text:span text:style-name="T49"><text:s text:c="2"/>→ </text:span><text:span text:style-name="T203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4"/>1. </text:span><text:span text:style-name="T299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2"><text:span text:style-name="T49"><text:s text:c="4"/>2. </text:span><text:span text:style-name="T165">Heap Property（父 ≥ 子）不能違反</text:span></text:p>
          </table:table-cell>
        </table:table-row>
      </table:table>
      <text:p text:style-name="P12"/>
      <text:p text:style-name="P33" loext:marker-style-name="T293"><text:span text:style-name="T110">「取出」的代價遠比「找到」高，是因為</text:span><text:span text:style-name="T223">刪除 Root 後必須完整修復整棵樹的結構。</text:span><text:span text:style-name="T294">流程如下：</text:span></text:p>
      <text:p text:style-name="P12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4" loext:marker-style-name="T42"><text:span text:style-name="T49">Extract-Max 完整流程（以上面的 Max Heap 為例）：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Step 1：取出 Root = 10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Step 2：把最後元素（葉節點最右端）60 搬到 Root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9"/>60 <text:s text:c="2"/>← 60 補位後，Heap Property 壞掉了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7"/>90 <text:s/>8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5"/>7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Step 3：60 &lt; 90，違反 Max Heap → 與較大子節點 90 交換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9"/>9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7"/>60 <text:s/>8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5"/>7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Step 4：60 &lt; 70，仍違反 → 再往下交換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9"/>9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7"/>70 <text:s/>80</text:span><text:span text:style-name="T42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4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<text:s text:c="5"/>60 <text:s text:c="2"/>← 60 最終落到葉節點，停止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49">這個「一路往下修正」的過程稱為 Heapify Down（向下沉）。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2"><text:span text:style-name="T167">最壞情況需走完整棵樹的高度 h = log₂n</text:span><text:span text:style-name="T49">，因此 </text:span><text:span text:style-name="T224">O(log n)</text:span><text:span text:style-name="T49">。</text:span></text:p>
          </table:table-cell>
        </table:table-row>
      </table:table>
      <text:p text:style-name="P12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4"/>
          </table:table-cell>
        </table:table-row>
        <table:table-row table:style-name="表格32.1">
          <table:table-cell table:style-name="表格32.A1" office:value-type="string">
            <text:p text:style-name="P4" loext:marker-style-name="T42"><text:span text:style-name="T49"><text:s text:c="2"/>Find <text:s text:c="2"/>= 看書架最上面那本書 → O(1)，就在眼前，看一眼即可。</text:span><text:span text:style-name="T42"/></text:p>
          </table:table-cell>
        </table:table-row>
        <table:table-row table:style-name="表格32.1">
          <table:table-cell table:style-name="表格32.A1" office:value-type="string">
            <text:p text:style-name="P4" loext:marker-style-name="T42"><text:span text:style-name="T49"><text:s text:c="2"/></text:span><text:span text:style-name="T50">Extract</text:span><text:span text:style-name="T49"> = </text:span><text:span text:style-name="T177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2"><text:span text:style-name="T49"><text:s text:c="11"/></text:span><text:span text:style-name="T203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2"><text:span text:style-name="T49"><text:s text:c="12"/></text:span><text:span text:style-name="T104">這個「整理」的工作量才是 O(log n) 的真正來源。</text:span></text:p>
          </table:table-cell>
        </table:table-row>
      </table:table>
      <text:p text:style-name="P12"/>
      <text:h text:style-name="P18" text:outline-level="2" loext:marker-style-name="T17"><text:span text:style-name="T18">7-4.6 <text:s/>Interval Heap 的 Extract-Min 與 Extract-Max 完整示範</text:span><text:span text:style-name="T17"/></text:h>
      <text:p text:style-name="P33" loext:marker-style-name="T293"><text:span text:style-name="T296">Interval Heap 的 Extract 操作，本質上就是普通 Heap 的 Heapify Down</text:span><text:span text:style-name="T294">，只是</text:span><text:span text:style-name="T195">同時維護 Min 端和 Max 端兩條性質</text:span><text:span text:style-name="T294">。以下用同一棵初始樹，分別展示兩種操作。</text:span></text:p>
      <text:p text:style-name="P12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4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2"><text:span text:style-name="T49"><text:s text:c="13"/>[10, 100] <text:s text:c="6"/>← Root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2"><text:span text:style-name="T49"><text:s text:c="12"/>/ <text:s text:c="9"/>\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2"><text:span text:style-name="T49"><text:s text:c="7"/>[20, 80] <text:s text:c="5"/>[30, 90]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2"><text:span text:style-name="T49">左值（min 端）形成 Min Heap： <text:s/>10 ≤ 20，10 ≤ 30 ✓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2"><text:span text:style-name="T49">右值（max 端）形成 Max Heap： <text:s/>100 ≥ 80，100 ≥ 90 ✓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2"><text:span text:style-name="T49">全域最小值 = Root 左值 = 10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2"><text:span text:style-name="T49">全域最大值 = Root 右值 = 100</text:span><text:span text:style-name="T42"/></text:p>
          </table:table-cell>
        </table:table-row>
      </table:table>
      <text:p text:style-name="P12"/>
      <text:h text:style-name="P18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4" loext:marker-style-name="T42"><text:span text:style-name="T49">Step 1：</text:span><text:span text:style-name="T302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2"><text:span text:style-name="T49"><text:s text:c="8"/>Root 左側空洞，需要補位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[ ?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/ <text:s text:c="7"/>\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6"/>[20, 80] <text:s text:c="3"/>[30, 9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Step 2：補位規則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8"/>把最後節點（[30, 90]）整體移除，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8"/>取其 min 端（30）補到 Root 的左值位置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8"/>（補 min 端修的是 Min Heap；補 max 端修的是 Max Heap）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[3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/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6"/>[2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Step 3：檢查 Min Heap 性質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8"/>Root min = 30，Child min = 20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8"/></text:span><text:span text:style-name="T133">30 &gt; 20 → 違反 Min Heap（父 ≤ 子）</text:span><text:span text:style-name="T49">→ </text:span><text:span text:style-name="T107">交換 min 端</text:span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Step 4：Heapify Down（min 端下沉）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[2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/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6"/>[3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8"/>20 ≤ 30 → 合法，停止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最終結果：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[2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<text:s text:c="11"/>/</text:span><text:span text:style-name="T42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2"><text:span text:style-name="T49"><text:s text:c="6"/>[3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2"><text:span text:style-name="T49">成功取出最小值 10，</text:span><text:span text:style-name="T203">Min Heap 與 Max Heap 性質皆完整恢復</text:span><text:span text:style-name="T49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4" loext:marker-style-name="T42"><text:span text:style-name="T49">使用同一棵初始樹：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3"/>[10, 10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2"/>/ <text:s text:c="9"/>\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7"/>[20, 80] <text:s text:c="5"/>[3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Step 1：</text:span><text:span text:style-name="T302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8"/>Root 右側空洞，需要補位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1"/>[10, <text:s/>? 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1"/>/ <text:s text:c="7"/>\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6"/>[20, 80] <text:s text:c="3"/>[3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Step 2：補位規則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8"/>把最後節點（[30, 90]）整體移除，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8"/>取其 max 端（90）補到 Root 的右值位置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1"/>[1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1"/>/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6"/>[20, 8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Step 3：檢查 Max Heap 性質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8"/>Root max = 90，Child max = 80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8"/>90 ≥ 80 → 符合 Max Heap → 無需交換，停止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ext:soft-page-break/>
        <table:table-row table:style-name="表格35.1">
          <table:table-cell table:style-name="表格35.A1" office:value-type="string">
            <text:p text:style-name="P4" loext:marker-style-name="T42"><text:span text:style-name="T49">最終結果：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1"/>[1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11"/>/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<text:s text:c="6"/>[20, 8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2"><text:span text:style-name="T49">成功取出最大值 100，</text:span><text:span text:style-name="T203">結構完整</text:span><text:span text:style-name="T49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三、Extract-Max 的下沉範例（需多次 Heapify）</text:span><text:span text:style-name="T17"/></text:h>
      <text:p text:style-name="P33" loext:marker-style-name="T293"><text:span text:style-name="T294">上例的 Max Heap 恰好不需要下沉。以下補充一個「確實需要多次下沉」的案例，更能體現 O(log n) 的代價：</text:span><text:span text:style-name="T293"/></text:p>
      <text:p text:style-name="P12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4" loext:marker-style-name="T42"><text:span text:style-name="T49">初始 Interval Heap（5 個節點）：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4"/>[10, 10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[20, 9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/ <text:s text:c="6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3"/>[40, 85] <text:s/>[5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Step 1：取出 Root max = 100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Step 2：最後節點 [50, 70] 移除，取其 max 端 70 補到 Root。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4"/>[1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[20, 9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3"/>[40, 8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Step 3：Root max = 70，子節點 max：左=95，右=90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較大子節點 max = 95 &gt; 70 → 違反 Max Heap → 70 與 95 交換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ext:soft-page-break/>
        <table:table-row table:style-name="表格36.1">
          <table:table-cell table:style-name="表格36.A1" office:value-type="string">
            <text:p text:style-name="P4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[20, 70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3"/>[40, 8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Step 4：[20, 70] 的 max = 70，子節點 max：左=85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85 &gt; 70 → 仍違反 → 70 與 85 交換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[20, 8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3"/>[4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Step 5：[40, 70] 已是葉節點 → 停止。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最終結果：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[20, 8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<text:s text:c="3"/>[4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2"><text:span text:style-name="T49">全域最大值已更新為 95。</text:span><text:span text:style-name="T42"/></text:p>
          </table:table-cell>
        </table:table-row>
      </table:table>
      <text:p text:style-name="P12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4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2"><text:span text:style-name="T49"><text:s text:c="2"/>操作 <text:s text:c="14"/>Interval Heap <text:s text:c="3"/>普通 Max Heap <text:s text:c="3"/>普通 Min Heap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2"><text:span text:style-name="T49"><text:s text:c="2"/>Find-Min（找最小） O(1) <text:s/>★ <text:s text:c="9"/>O(n) <text:s text:c="12"/>O(1)</text:span><text:span text:style-name="T42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4" loext:marker-style-name="T42"><text:span text:style-name="T49"><text:s text:c="2"/>Find-Max（找最大） O(1) <text:s/>★ <text:s text:c="9"/>O(1) <text:s text:c="12"/>O(n)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36"><text:s text:c="2"/>Extract-Min <text:s text:c="7"/>O(log n) <text:s text:c="9"/></text:span><text:span text:style-name="T300">O(n) </text:span><text:span text:style-name="T236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36"><text:s text:c="2"/>Extract-Max <text:s text:c="7"/>O(log n) <text:s text:c="9"/>O(log n) <text:s text:c="8"/></text:span><text:span text:style-name="T301">O(n)</text:span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2"><text:span text:style-name="T104">Interval Heap 的兩個 Extract 都是 O(log n)</text:span><text:span text:style-name="T49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4" loext:marker-style-name="T42"><text:span text:style-name="T49">Find 快是因為答案就在 Root；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2"><text:span text:style-name="T227">Extract 要 O(log n) </text:span><text:span text:style-name="T49">是因為</text:span><text:span text:style-name="T224">刪除後必須 Heapify Down 修復結構</text:span><text:span text:style-name="T49">。</text:span></text:p>
          </table:table-cell>
        </table:table-row>
      </table:table>
      <text:p text:style-name="P12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4" loext:marker-style-name="T42"><text:span text:style-name="T49">⚠️ <text:s/>常見混淆整理：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2"><text:span text:style-name="T49">「Root 節點同時持有全域最小與最大值，所以 O(1) 找到。」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2"><text:span text:style-name="T49">→ 正確。Find = 讀一個值，完全不修改樹，當然 O(1)。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2"><text:span text:style-name="T49">「Find 都 O(1) 了，Extract 怎麼還要 O(log n)？」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2"><text:span text:style-name="T49">→ 因為</text:span><text:span text:style-name="T168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4" loext:marker-style-name="T42"><text:span text:style-name="T49"><text:s text:c="2"/></text:span><text:span text:style-name="T118">刪除後最後元素補位</text:span><text:span text:style-name="T49">，再 Heapify Down 重建性質，</text:span></text:p>
          </table:table-cell>
        </table:table-row>
        <table:table-row table:style-name="表格38.1">
          <table:table-cell table:style-name="表格38.A1" office:value-type="string">
            <text:p text:style-name="P4" loext:marker-style-name="T42"><text:span text:style-name="T49"><text:s text:c="2"/>最壞走 log n 層 → O(log n)。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2"><text:span text:style-name="T49">記法：Find = 看，不動樹 → O(1)。</text:span><text:span text:style-name="T203">Extract = 拿走，要整理 → O(log n)</text:span><text:span text:style-name="T49">。</text:span></text:p>
          </table:table-cell>
        </table:table-row>
      </table:table>
      <text:p text:style-name="P12"/>
      <text:p text:style-name="P12"/>
      <text:h text:style-name="P3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303"><text:span text:style-name="T304">操作</text:span><text:span text:style-name="T303"/></text:p>
          </table:table-cell>
          <table:table-cell table:style-name="表格39.A1" office:value-type="string">
            <text:p text:style-name="Standard" loext:marker-style-name="T303"><text:span text:style-name="T303">Interval Heap</text:span><text:span text:style-name="T303"/></text:p>
          </table:table-cell>
          <table:table-cell table:style-name="表格39.A1" office:value-type="string">
            <text:p text:style-name="Standard" loext:marker-style-name="T303"><text:span text:style-name="T304">普通 </text:span><text:span text:style-name="T303">Max Heap</text:span></text:p>
          </table:table-cell>
          <table:table-cell table:style-name="表格39.A1" office:value-type="string">
            <text:p text:style-name="Standard" loext:marker-style-name="T303"><text:span text:style-name="T304">普通 </text:span><text:span text:style-name="T303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81"><text:span text:style-name="T281">Find-Min</text:span><text:span text:style-name="T282">（找最小值）</text:span></text:p>
          </table:table-cell>
          <table:table-cell table:style-name="表格39.A2" office:value-type="string">
            <text:p text:style-name="Standard" loext:marker-style-name="T281"><text:span text:style-name="T281">O(1) ★</text:span><text:span text:style-name="T281"/></text:p>
          </table:table-cell>
          <table:table-cell table:style-name="表格39.A2" office:value-type="string">
            <text:p text:style-name="Standard" loext:marker-style-name="T281"><text:span text:style-name="T281">O(n)</text:span><text:span text:style-name="T281"/></text:p>
          </table:table-cell>
          <table:table-cell table:style-name="表格39.A2" office:value-type="string">
            <text:p text:style-name="Standard" loext:marker-style-name="T281"><text:span text:style-name="T281">O(1)</text:span><text:span text:style-name="T28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81"><text:span text:style-name="T281">Find-Max</text:span><text:span text:style-name="T282">（找最大值）</text:span></text:p>
          </table:table-cell>
          <table:table-cell table:style-name="表格39.A3" office:value-type="string">
            <text:p text:style-name="Standard" loext:marker-style-name="T281"><text:span text:style-name="T281">O(1) ★</text:span><text:span text:style-name="T281"/></text:p>
          </table:table-cell>
          <table:table-cell table:style-name="表格39.A3" office:value-type="string">
            <text:p text:style-name="Standard" loext:marker-style-name="T281"><text:span text:style-name="T281">O(1)</text:span><text:span text:style-name="T281"/></text:p>
          </table:table-cell>
          <table:table-cell table:style-name="表格39.A3" office:value-type="string">
            <text:p text:style-name="Standard" loext:marker-style-name="T281"><text:span text:style-name="T281">O(n)</text:span><text:span text:style-name="T281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81"><text:span text:style-name="T281">Extract-Min</text:span><text:span text:style-name="T282">（取出最小）</text:span></text:p>
          </table:table-cell>
          <table:table-cell table:style-name="表格39.A2" office:value-type="string">
            <text:p text:style-name="P49"><text:span text:style-name="T238">O(log n) ★</text:span></text:p>
          </table:table-cell>
          <table:table-cell table:style-name="表格39.A2" office:value-type="string">
            <text:p text:style-name="P48"><text:span text:style-name="T238">O(n)</text:span></text:p>
          </table:table-cell>
          <table:table-cell table:style-name="表格39.A2" office:value-type="string">
            <text:p text:style-name="Standard" loext:marker-style-name="T281"><text:span text:style-name="T281">O(log n)</text:span><text:span text:style-name="T28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81"><text:span text:style-name="T281">Extract-Max</text:span><text:span text:style-name="T282">（取出最大）</text:span></text:p>
          </table:table-cell>
          <table:table-cell table:style-name="表格39.A3" office:value-type="string">
            <text:p text:style-name="P49"><text:span text:style-name="T238">O(log n) ★</text:span></text:p>
          </table:table-cell>
          <table:table-cell table:style-name="表格39.A3" office:value-type="string">
            <text:p text:style-name="Standard" loext:marker-style-name="T281"><text:span text:style-name="T281">O(log n)</text:span><text:span text:style-name="T281"/></text:p>
          </table:table-cell>
          <table:table-cell table:style-name="表格39.A3" office:value-type="string">
            <text:p text:style-name="P48"><text:span text:style-name="T238">O(n)</text:span></text:p>
          </table:table-cell>
        </table:table-row>
      </table:table>
      <text:p text:style-name="P7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11" loext:marker-style-name="T249"><text:span text:style-name="T249">⚠️ <text:s/></text:span><text:span text:style-name="T250">普通 </text:span><text:span text:style-name="T249">Min/Max Heap </text:span><text:span text:style-name="T250">各有盲點：</text:span></text:p>
            <text:p text:style-name="P11" loext:marker-style-name="T264"><text:span text:style-name="T68">普通 </text:span><text:span text:style-name="T69">Max Heap </text:span><text:span text:style-name="T68">找最小值 </text:span><text:span text:style-name="T265">→ </text:span><text:span text:style-name="T253">O(n)</text:span><text:span text:style-name="T251">（要掃整棵樹）</text:span></text:p>
            <text:p text:style-name="P11" loext:marker-style-name="T264"><text:span text:style-name="T78">普通 </text:span><text:span text:style-name="T79">Min Heap </text:span><text:span text:style-name="T78">找最大值 </text:span><text:span text:style-name="T265">→ </text:span><text:span text:style-name="T253">O(n)</text:span><text:span text:style-name="T251">（同理）</text:span></text:p>
            <text:p text:style-name="P46" loext:marker-style-name="T264"><text:span text:style-name="T86">Interval Heap </text:span><text:span text:style-name="T84">解決此問題，兩端操作都達到 </text:span><text:span text:style-name="T86">O(log n)</text:span><text:span text:style-name="T265">，這是其最大優勢。</text:span></text:p>
          </table:table-cell>
        </table:table-row>
      </table:table>
      <text:p text:style-name="P12"/>
      <text:h text:style-name="P3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7" loext:marker-style-name="T247"><text:span text:style-name="T248">以下示範將數字 </text:span><text:span text:style-name="T247">5 </text:span><text:span text:style-name="T248">插入含 </text:span><text:span text:style-name="T247">{10, 100}, {20, 80}, {30, 90} </text:span><text:span text:style-name="T248">的 </text:span><text:span text:style-name="T247">Interval Heap</text:span><text:span text:style-name="T248">：</text:span></text:p>
      <text:p text:style-name="P42" loext:marker-style-name="T283"><text:span text:style-name="T283">初始： <text:s text:c="10"/>[10, 100]</text:span><text:span text:style-name="T283"/></text:p>
      <text:p text:style-name="P8" loext:marker-style-name="T283"><text:span text:style-name="T283"><text:s text:c="18"/>/ <text:s text:c="7"/>\</text:span><text:span text:style-name="T283"/></text:p>
      <text:p text:style-name="P8" loext:marker-style-name="T283"><text:span text:style-name="T283"><text:s text:c="13"/>[20, 80] <text:s text:c="2"/>[30, 90]</text:span><text:span text:style-name="T283"/></text:p>
      <text:p text:style-name="P8"/>
      <text:p text:style-name="P8" loext:marker-style-name="T283"><text:span text:style-name="T283">Step 1：</text:span><text:span text:style-name="T284">新葉 [5, 5] </text:span><text:span text:style-name="T283">接在 [20, 80] 左子位置</text:span></text:p>
      <text:p text:style-name="P8" loext:marker-style-name="T283"><text:span text:style-name="T283"><text:s text:c="13"/>[10, 100]</text:span><text:span text:style-name="T283"/></text:p>
      <text:p text:style-name="P8" loext:marker-style-name="T283"><text:span text:style-name="T283"><text:s text:c="14"/>/ <text:s text:c="7"/>\</text:span><text:span text:style-name="T283"/></text:p>
      <text:p text:style-name="P8" loext:marker-style-name="T283"><text:span text:style-name="T283"><text:s text:c="9"/>[20, 80] <text:s text:c="2"/>[30, 90]</text:span><text:span text:style-name="T283"/></text:p>
      <text:p text:style-name="P8" loext:marker-style-name="T283"><text:span text:style-name="T283"><text:s text:c="14"/>/</text:span><text:span text:style-name="T283"/></text:p>
      <text:p text:style-name="P8" loext:marker-style-name="T283"><text:span text:style-name="T283"><text:s text:c="11"/>[5, 5] <text:s text:c="2"/>← </text:span><text:span text:style-name="T76">5 &lt; parent.min(20)</text:span><text:span text:style-name="T283">，</text:span><text:span text:style-name="T208">min 端需上浮</text:span></text:p>
      <text:p text:style-name="P8"/>
      <text:p text:style-name="P8" loext:marker-style-name="T283"><text:span text:style-name="T283">Step 2：</text:span><text:span text:style-name="T157">交換 min 端 → [20,80]→[5,80]</text:span><text:span text:style-name="T283">，</text:span><text:span text:style-name="T208">葉→[20,20]</text:span></text:p>
      <text:p text:style-name="P8" loext:marker-style-name="T283"><text:span text:style-name="T283"><text:s text:c="13"/>[10, 100]</text:span><text:span text:style-name="T283"/></text:p>
      <text:p text:style-name="P8" loext:marker-style-name="T283"><text:span text:style-name="T283"><text:s text:c="14"/>/ <text:s text:c="7"/>\</text:span><text:span text:style-name="T283"/></text:p>
      <text:p text:style-name="P8" loext:marker-style-name="T283"><text:span text:style-name="T283"><text:s text:c="10"/>[5, 80] <text:s text:c="2"/>[30, 90] <text:s text:c="2"/>← </text:span><text:span text:style-name="T76">5 &lt; Root.min(10)</text:span><text:span text:style-name="T283">，</text:span><text:span text:style-name="T208">繼續上浮</text:span></text:p>
      <text:p text:style-name="P8" loext:marker-style-name="T283"><text:span text:style-name="T283"><text:s text:c="14"/>/</text:span><text:span text:style-name="T283"/></text:p>
      <text:p text:style-name="P8" loext:marker-style-name="T283"><text:span text:style-name="T283"><text:s text:c="10"/>[20, 20]</text:span><text:span text:style-name="T283"/></text:p>
      <text:p text:style-name="P8"/>
      <text:p text:style-name="P8" loext:marker-style-name="T283"><text:span text:style-name="T283">Step 3：</text:span><text:span text:style-name="T157">交換 min 端 → Root[10,100]→[5,100]</text:span><text:span text:style-name="T283">，</text:span><text:span text:style-name="T208">[5,80]→[10,80]</text:span></text:p>
      <text:p text:style-name="P8"/>
      <text:p text:style-name="P8" loext:marker-style-name="T283"><text:span text:style-name="T283">最終： <text:s text:c="10"/>[5, 100] <text:s text:c="2"/>← </text:span><text:span text:style-name="T166">全域最小值已更新</text:span></text:p>
      <text:p text:style-name="P8" loext:marker-style-name="T283"><text:span text:style-name="T283"><text:s text:c="18"/>/ <text:s text:c="7"/>\</text:span><text:span text:style-name="T283"/></text:p>
      <text:p text:style-name="P8" loext:marker-style-name="T283"><text:span text:style-name="T283"><text:s text:c="13"/>[10, 80] <text:s text:c="2"/>[30, 90]</text:span><text:span text:style-name="T283"/></text:p>
      <text:p text:style-name="P8" loext:marker-style-name="T283"><text:span text:style-name="T283"><text:s text:c="18"/>/</text:span><text:span text:style-name="T283"/></text:p>
      <text:p text:style-name="P44" loext:marker-style-name="T283"><text:span text:style-name="T283"><text:s text:c="13"/>[20, 20]</text:span><text:span text:style-name="T283"/></text:p>
      <text:p text:style-name="P11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1" loext:marker-style-name="T249"><text:span text:style-name="T249">Insert </text:span><text:span text:style-name="T250">規則：</text:span></text:p>
            <text:p text:style-name="P11" loext:marker-style-name="T264"><text:span text:style-name="T265">新值 </text:span><text:span text:style-name="T264">&lt; </text:span><text:span text:style-name="T265">父節點左值（</text:span><text:span text:style-name="T264">min</text:span><text:span text:style-name="T265">）→ 交換左值，繼續往上（</text:span><text:span text:style-name="T264">min </text:span><text:span text:style-name="T265">端上浮）</text:span></text:p>
            <text:p text:style-name="P11" loext:marker-style-name="T264"><text:span text:style-name="T265">新值 </text:span><text:span text:style-name="T264">&gt; </text:span><text:span text:style-name="T265">父節點右值（</text:span><text:span text:style-name="T264">max</text:span><text:span text:style-name="T265">）→ 交換右值，繼續往上（</text:span><text:span text:style-name="T264">max </text:span><text:span text:style-name="T265">端上浮）</text:span></text:p>
            <text:p text:style-name="P50"><text:span text:style-name="T241">新值介於父節點 </text:span><text:span text:style-name="T242">[min, max] </text:span><text:span text:style-name="T241">之間 → 合法，停止</text:span></text:p>
          </table:table-cell>
        </table:table-row>
      </table:table>
      <text:h text:style-name="P2" text:outline-level="1"><text:span text:style-name="T244">八、合併兩個 </text:span><text:span text:style-name="T243">Heap</text:span><text:span text:style-name="T244">（</text:span><text:span text:style-name="T243">Merge Heap</text:span><text:span text:style-name="T244">）【</text:span><text:span text:style-name="T243">111</text:span><text:span text:style-name="T244">地</text:span><text:span text:style-name="T243">Q4</text:span><text:span text:style-name="T244">】</text:span></text:h>
      <text:h text:style-name="P3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7" loext:marker-style-name="T247"><text:span text:style-name="T248">假設現在有兩個 </text:span><text:span text:style-name="T247">Max Heap A </text:span><text:span text:style-name="T248">和 </text:span><text:span text:style-name="T247">B</text:span><text:span text:style-name="T248">，你想把它們合併成一個新的 </text:span><text:span text:style-name="T247">Max Heap</text:span><text:span text:style-name="T248">：</text:span></text:p>
      <text:p text:style-name="P42" loext:marker-style-name="T283"><text:soft-page-break/><text:span text:style-name="T283"><text:s text:c="2"/>Heap A： <text:s text:c="9"/>Heap B： <text:s text:c="9"/>合併目標：</text:span><text:span text:style-name="T283"/></text:p>
      <text:p text:style-name="P8" loext:marker-style-name="T283"><text:span text:style-name="T283"><text:s text:c="7"/>90 <text:s text:c="15"/>95 <text:s text:c="16"/>95</text:span><text:span text:style-name="T283"/></text:p>
      <text:p text:style-name="P8" loext:marker-style-name="T283"><text:span text:style-name="T283"><text:s text:c="6"/>/ <text:s/>\ <text:s text:c="13"/>/ <text:s/>\ <text:s text:c="14"/>/ <text:s text:c="3"/>\</text:span><text:span text:style-name="T283"/></text:p>
      <text:p text:style-name="P8" loext:marker-style-name="T283"><text:span text:style-name="T283"><text:s text:c="5"/>70 <text:s text:c="2"/>80 <text:s text:c="10"/>60 <text:s text:c="2"/>50 <text:s text:c="10"/>90 <text:s text:c="5"/>80</text:span><text:span text:style-name="T283"/></text:p>
      <text:p text:style-name="P8" loext:marker-style-name="T283"><text:span text:style-name="T283"><text:s text:c="40"/>/ <text:s/>\ <text:s text:c="2"/>/</text:span><text:span text:style-name="T283"/></text:p>
      <text:p text:style-name="P44" loext:marker-style-name="T283"><text:span text:style-name="T283"><text:s text:c="39"/>70 <text:s/>60 50</text:span><text:span text:style-name="T283"/></text:p>
      <text:p text:style-name="P11"/>
      <text:p text:style-name="P7" loext:marker-style-name="T247"><text:span text:style-name="T85">普通 </text:span><text:span text:style-name="T87">Binary Heap </text:span><text:span text:style-name="T85">沒有高效的合併方法</text:span><text:span text:style-name="T248">，通常只能：</text:span></text:p>
      <text:list text:continue-numbering="true" text:style-name="WWNum14">
        <text:list-item>
          <text:p text:style-name="P29" loext:marker-style-name="T247"><text:span text:style-name="T248">方法：</text:span><text:span text:style-name="T124">把 </text:span><text:span text:style-name="T125">A </text:span><text:span text:style-name="T124">和 </text:span><text:span text:style-name="T125">B </text:span><text:span text:style-name="T124">的所有元素倒出來，重新執行 </text:span><text:span text:style-name="T125">Bottom-Up Build Heap</text:span><text:span text:style-name="T248">。</text:span></text:p>
        </text:list-item>
        <text:list-item>
          <text:p text:style-name="P29" loext:marker-style-name="T247"><text:span text:style-name="T215">代價：</text:span><text:span text:style-name="T216">O(n+m)</text:span><text:span text:style-name="T215">，</text:span><text:span text:style-name="T216">n </text:span><text:span text:style-name="T215">和 </text:span><text:span text:style-name="T216">m </text:span><text:span text:style-name="T215">是兩個 </text:span><text:span text:style-name="T216">Heap </text:span><text:span text:style-name="T215">的大小</text:span><text:span text:style-name="T248">。</text:span></text:p>
        </text:list-item>
      </text:list>
      <text:p text:style-name="P11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1" loext:marker-style-name="T249"><text:span text:style-name="T249">❓ </text:span><text:span text:style-name="T254">O(n+m) </text:span><text:span text:style-name="T252">有什麼問題</text:span><text:span text:style-name="T250">？</text:span></text:p>
            <text:p text:style-name="P11" loext:marker-style-name="T264"><text:span text:style-name="T189">對單次合併來說 </text:span><text:span text:style-name="T190">O(n+m) </text:span><text:span text:style-name="T189">尚可接受，但有些系統一天要合併幾十萬次</text:span><text:span text:style-name="T265">：</text:span></text:p>
            <text:p text:style-name="P11" loext:marker-style-name="T264"><text:span text:style-name="T264"><text:s text:c="2"/>• Event-driven Simulation</text:span><text:span text:style-name="T265">（事件驅動模擬）</text:span></text:p>
            <text:p text:style-name="P11" loext:marker-style-name="T264"><text:span text:style-name="T264"><text:s text:c="2"/>• </text:span><text:span text:style-name="T265">作業系統排程器（</text:span><text:span text:style-name="T264">Scheduler</text:span><text:span text:style-name="T265">）</text:span></text:p>
            <text:p text:style-name="P46" loext:marker-style-name="T264"><text:span text:style-name="T264"><text:s text:c="2"/>• </text:span><text:span text:style-name="T265">分散式工作佇列（</text:span><text:span text:style-name="T264">Distributed Job Queue</text:span><text:span text:style-name="T265">）</text:span></text:p>
          </table:table-cell>
        </table:table-row>
      </table:table>
      <text:p text:style-name="P51"/>
      <text:h text:style-name="P3" text:outline-level="2" loext:marker-style-name="T20"><text:span text:style-name="T20">8-2 <text:s/></text:span><text:span text:style-name="T23">解決方案：把右側路徑弄得很短</text:span></text:h>
      <text:p text:style-name="P7" loext:marker-style-name="T247"><text:span text:style-name="T248">發明者的想法很直接：</text:span><text:span text:style-name="T247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49"><text:span text:style-name="T187">Merge </text:span><text:span text:style-name="T188">只沿右側路徑（</text:span><text:span text:style-name="T187">right path</text:span><text:span text:style-name="T188">）遞迴進行</text:span><text:span text:style-name="T250">。</text:span></text:p>
            <text:p text:style-name="P11" loext:marker-style-name="T264"><text:span text:style-name="T85">如果右側路徑很短 → </text:span><text:span text:style-name="T87">Merge </text:span><text:span text:style-name="T85">就很快</text:span><text:span text:style-name="T265">。</text:span></text:p>
            <text:p text:style-name="P46" loext:marker-style-name="T264"><text:span text:style-name="T265">因此：</text:span><text:span text:style-name="T189">故意把樹弄歪，讓右側路徑保持極短</text:span><text:span text:style-name="T265">。</text:span></text:p>
          </table:table-cell>
        </table:table-row>
      </table:table>
      <text:p text:style-name="P11"/>
      <text:p text:style-name="P42" loext:marker-style-name="T283"><text:span text:style-name="T283"><text:s text:c="2"/>普通 Heap（平衡）： <text:s text:c="11"/>Leftist Heap（故意偏左）：</text:span><text:span text:style-name="T283"/></text:p>
      <text:p text:style-name="P8" loext:marker-style-name="T283"><text:span text:style-name="T283"><text:s text:c="8"/>90 <text:s text:c="29"/>90</text:span><text:span text:style-name="T283"/></text:p>
      <text:p text:style-name="P8" loext:marker-style-name="T283"><text:span text:style-name="T283"><text:s text:c="7"/>/ <text:s/>\ <text:s text:c="27"/>/</text:span><text:span text:style-name="T283"/></text:p>
      <text:p text:style-name="P8" loext:marker-style-name="T283"><text:span text:style-name="T283"><text:s text:c="6"/>80 <text:s text:c="2"/>70 <text:s text:c="24"/>80</text:span><text:span text:style-name="T283"/></text:p>
      <text:p text:style-name="P8" loext:marker-style-name="T283"><text:span text:style-name="T283"><text:s text:c="5"/>/ \ / \ <text:s text:c="24"/>/</text:span><text:span text:style-name="T283"/></text:p>
      <text:p text:style-name="P8" loext:marker-style-name="T283"><text:span text:style-name="T283"><text:s text:c="4"/>60 50 40 30 <text:s text:c="21"/>70</text:span><text:span text:style-name="T283"/></text:p>
      <text:p text:style-name="P8" loext:marker-style-name="T283"><text:span text:style-name="T283"><text:s text:c="36"/>/</text:span><text:span text:style-name="T283"/></text:p>
      <text:p text:style-name="P8" loext:marker-style-name="T283"><text:span text:style-name="T283"><text:s text:c="35"/>60</text:span><text:span text:style-name="T283"/></text:p>
      <text:p text:style-name="P8"/>
      <text:p text:style-name="P44" loext:marker-style-name="T283"><text:span text:style-name="T283"><text:s text:c="2"/>左右差不多，Merge 要走很深 <text:s text:c="5"/>右側路徑只有 1 步！Merge 超快</text:span><text:span text:style-name="T283"/></text:p>
      <text:p text:style-name="P12"/>
      <text:h text:style-name="P3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7" loext:marker-style-name="T247"><text:span text:style-name="T247">NPL </text:span><text:span text:style-name="T248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1" loext:marker-style-name="T249"><text:span text:style-name="T249">NPL(node) = </text:span><text:span text:style-name="T250">從該節點出發，走到最近的空節點（</text:span><text:span text:style-name="T249">null</text:span><text:span text:style-name="T250">）所需的步數</text:span></text:p>
            <text:p text:style-name="P46" loext:marker-style-name="T264"><text:span text:style-name="T264">NPL(null) = -1 <text:s/></text:span><text:span text:style-name="T265">（空節點本身的定義）</text:span></text:p>
          </table:table-cell>
        </table:table-row>
      </table:table>
      <text:p text:style-name="P11"><text:soft-page-break/></text:p>
      <text:p text:style-name="P7" loext:marker-style-name="T247"><text:span text:style-name="T248">公式：</text:span><text:span text:style-name="T247">NPL(node) = 1 + min( NPL(</text:span><text:span text:style-name="T248">左子</text:span><text:span text:style-name="T247">), NPL(</text:span><text:span text:style-name="T248">右子</text:span><text:span text:style-name="T247">) )</text:span></text:p>
      <text:p text:style-name="P11"/>
      <text:p text:style-name="P47" loext:marker-style-name="T245"><text:span text:style-name="T245">NPL </text:span><text:span text:style-name="T246">計算範例</text:span></text:p>
      <text:p text:style-name="P42" loext:marker-style-name="T283"><text:span text:style-name="T283"><text:s text:c="14"/>3 <text:s text:c="11"/>← 算 NPL</text:span><text:span text:style-name="T283"/></text:p>
      <text:p text:style-name="P8" loext:marker-style-name="T283"><text:span text:style-name="T283"><text:s text:c="13"/>/ \</text:span><text:span text:style-name="T283"/></text:p>
      <text:p text:style-name="P8" loext:marker-style-name="T283"><text:span text:style-name="T283"><text:s text:c="12"/>5 <text:s text:c="2"/>8</text:span><text:span text:style-name="T283"/></text:p>
      <text:p text:style-name="P8" loext:marker-style-name="T283"><text:span text:style-name="T283"><text:s text:c="11"/>/ \</text:span><text:span text:style-name="T283"/></text:p>
      <text:p text:style-name="P8" loext:marker-style-name="T283"><text:span text:style-name="T283"><text:s text:c="10"/>9 <text:s text:c="2"/>7</text:span><text:span text:style-name="T283"/></text:p>
      <text:p text:style-name="P8"/>
      <text:p text:style-name="P8" loext:marker-style-name="T283"><text:span text:style-name="T283"><text:s text:c="2"/>計算（由葉往根）：</text:span><text:span text:style-name="T283"/></text:p>
      <text:p text:style-name="P8" loext:marker-style-name="T283"><text:span text:style-name="T283"><text:s text:c="4"/>NPL(9) = 1 + min(-1,-1) = 0 <text:s text:c="2"/>（葉節點，兩側皆空）</text:span><text:span text:style-name="T283"/></text:p>
      <text:p text:style-name="P8" loext:marker-style-name="T283"><text:span text:style-name="T283"><text:s text:c="4"/>NPL(7) = 0 <text:s text:c="20"/>（同上）</text:span><text:span text:style-name="T283"/></text:p>
      <text:p text:style-name="P8" loext:marker-style-name="T283"><text:span text:style-name="T283"><text:s text:c="4"/>NPL(8) = 0 <text:s text:c="20"/>（葉節點）</text:span><text:span text:style-name="T283"/></text:p>
      <text:p text:style-name="P8" loext:marker-style-name="T283"><text:span text:style-name="T283"><text:s text:c="4"/>NPL(5) = 1 + min(NPL(9),NPL(7)) = 1+min(0,0) = 1</text:span><text:span text:style-name="T283"/></text:p>
      <text:p text:style-name="P44" loext:marker-style-name="T283"><text:span text:style-name="T283"><text:s text:c="4"/>NPL(3) = 1 + min(NPL(5),NPL(8)) = 1+min(1,0) = 1</text:span><text:span text:style-name="T283"/></text:p>
      <text:p text:style-name="P12"/>
      <text:h text:style-name="P3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7" loext:marker-style-name="T247"><text:span text:style-name="T247">Leftist Heap </text:span><text:span text:style-name="T248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1" loext:marker-style-name="T249"><text:span text:style-name="T250">每個節點：</text:span><text:span text:style-name="T249">NPL</text:span><text:span text:style-name="T250">（左子樹）≥ </text:span><text:span text:style-name="T249">NPL</text:span><text:span text:style-name="T250">（右子樹）</text:span></text:p>
            <text:p text:style-name="P46" loext:marker-style-name="T264"><text:span text:style-name="T265">意思：左邊一定比右邊「深」或「一樣深」→ 右側路徑一定是最短路徑。</text:span><text:span text:style-name="T264"/></text:p>
          </table:table-cell>
        </table:table-row>
      </table:table>
      <text:p text:style-name="P11"/>
      <text:p text:style-name="P7" loext:marker-style-name="T247"><text:span text:style-name="T248">這個規定保證了：</text:span><text:span text:style-name="T247"/></text:p>
      <text:list text:continue-numbering="true" text:style-name="WWNum14">
        <text:list-item>
          <text:p text:style-name="P29" loext:marker-style-name="T247"><text:span text:style-name="T248">右側路徑長度 ≤ </text:span><text:span text:style-name="T247">log(n+1) <text:s/></text:span><text:span text:style-name="T248">（即使整棵樹有 </text:span><text:span text:style-name="T247">n </text:span><text:span text:style-name="T248">個節點，右路徑也不超過 </text:span><text:span text:style-name="T247">log n </text:span><text:span text:style-name="T248">步）</text:span></text:p>
        </text:list-item>
        <text:list-item>
          <text:p text:style-name="P29" loext:marker-style-name="T247"><text:span text:style-name="T247">Merge </text:span><text:span text:style-name="T248">沿右路徑進行 → 深度 ≤ </text:span><text:span text:style-name="T247">log n → </text:span><text:span text:style-name="T248">時間 </text:span><text:span text:style-name="T247">O(log n)</text:span></text:p>
        </text:list-item>
      </text:list>
      <text:p text:style-name="P11"/>
      <text:p text:style-name="P47" loext:marker-style-name="T245"><text:span text:style-name="T246">上面範例的左偏驗證</text:span><text:span text:style-name="T245"/></text:p>
      <text:p text:style-name="P42" loext:marker-style-name="T283"><text:span text:style-name="T283"><text:s text:c="2"/>節點 3：NPL(左=5) = 1 <text:s/>≥ <text:s/>NPL(右=8) = 0 <text:s text:c="2"/>✓ 左偏</text:span><text:span text:style-name="T283"/></text:p>
      <text:p text:style-name="P8" loext:marker-style-name="T283"><text:span text:style-name="T283"><text:s text:c="2"/>節點 5：NPL(左=9) = 0 <text:s/>≥ <text:s/>NPL(右=7) = 0 <text:s text:c="2"/>✓ 左偏（相等也算）</text:span><text:span text:style-name="T283"/></text:p>
      <text:p text:style-name="P8"/>
      <text:p text:style-name="P44" loext:marker-style-name="T283"><text:span text:style-name="T283">→ 此樹是合法的 Min Leftist Heap ✓</text:span><text:span text:style-name="T283"/></text:p>
      <text:p text:style-name="P12"/>
      <text:h text:style-name="P3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7" loext:marker-style-name="T247"><text:span text:style-name="T248">只有四個步驟，每次都沿右側路徑遞迴：</text:span><text:span text:style-name="T247"/></text:p>
      <text:p text:style-name="P42" loext:marker-style-name="T283"><text:span text:style-name="T283"><text:s text:c="2"/>Step 1：比較 A 和 B 的 Root</text:span><text:span text:style-name="T283"/></text:p>
      <text:p text:style-name="P8" loext:marker-style-name="T283"><text:span text:style-name="T283"><text:s text:c="11"/>→ 較小的 Root 成為新 Root（Min Heap）</text:span><text:span text:style-name="T283"/></text:p>
      <text:p text:style-name="P8" loext:marker-style-name="T283"><text:span text:style-name="T283"><text:s text:c="11"/>→ 較大的 Root 成為另一個子樹（稱為 b）</text:span><text:span text:style-name="T283"/></text:p>
      <text:p text:style-name="P8"/>
      <text:p text:style-name="P8" loext:marker-style-name="T283"><text:span text:style-name="T283"><text:s text:c="2"/>Step 2：遞迴合併「新 Root 的右子樹」與「b」</text:span><text:span text:style-name="T283"/></text:p>
      <text:p text:style-name="P8" loext:marker-style-name="T283"><text:span text:style-name="T283"><text:s text:c="11"/>→ Merge(newRoot.right, b)</text:span><text:span text:style-name="T283"/></text:p>
      <text:p text:style-name="P8"/>
      <text:p text:style-name="P8" loext:marker-style-name="T283"><text:soft-page-break/><text:span text:style-name="T283"><text:s text:c="2"/>Step 3：合併完後，若 NPL(右子樹) &gt; NPL(左子樹)</text:span><text:span text:style-name="T283"/></text:p>
      <text:p text:style-name="P8" loext:marker-style-name="T283"><text:span text:style-name="T283"><text:s text:c="11"/>→ 交換左右子樹，恢復左偏性質</text:span><text:span text:style-name="T283"/></text:p>
      <text:p text:style-name="P8"/>
      <text:p text:style-name="P44" loext:marker-style-name="T283"><text:span text:style-name="T283"><text:s text:c="2"/>Step 4：更新 NPL 值</text:span><text:span text:style-name="T283"/></text:p>
      <text:p text:style-name="P11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1" loext:marker-style-name="T249"><text:span text:style-name="T250">為什麼只走右側路徑？</text:span><text:span text:style-name="T249"/></text:p>
            <text:p text:style-name="P11" loext:marker-style-name="T264"><text:span text:style-name="T264">Merge </text:span><text:span text:style-name="T265">每次遞迴都只取「右子樹」→ 路徑深度 </text:span><text:span text:style-name="T264">= </text:span><text:span text:style-name="T265">右側路徑長度 ≤ </text:span><text:span text:style-name="T264">log n</text:span><text:span text:style-name="T265">。</text:span></text:p>
            <text:p text:style-name="P46" loext:marker-style-name="T264"><text:span text:style-name="T265">左側路徑完全不碰，保持不變。</text:span><text:span text:style-name="T264"/></text:p>
          </table:table-cell>
        </table:table-row>
      </table:table>
      <text:p text:style-name="P12"/>
      <text:h text:style-name="P3" text:outline-level="2" loext:marker-style-name="T20"><text:span text:style-name="T20">8-6 <text:s/>Merge </text:span><text:span text:style-name="T21">完整範例</text:span></text:h>
      <text:p text:style-name="P42" loext:marker-style-name="T283"><text:span text:style-name="T283"><text:s text:c="2"/>Heap A（NPL=1）： <text:s text:c="5"/>Heap B（NPL=1）：</text:span><text:span text:style-name="T283"/></text:p>
      <text:p text:style-name="P8" loext:marker-style-name="T283"><text:span text:style-name="T283"><text:s text:c="10"/>3 <text:s text:c="21"/>6</text:span><text:span text:style-name="T283"/></text:p>
      <text:p text:style-name="P8" loext:marker-style-name="T283"><text:span text:style-name="T283"><text:s text:c="9"/>/ \ <text:s text:c="18"/>/ \</text:span><text:span text:style-name="T283"/></text:p>
      <text:p text:style-name="P8" loext:marker-style-name="T283"><text:span text:style-name="T283"><text:s text:c="8"/>5 <text:s text:c="2"/>8 <text:s text:c="15"/>12 <text:s text:c="2"/>7</text:span><text:span text:style-name="T283"/></text:p>
      <text:p text:style-name="P8"/>
      <text:p text:style-name="P8" loext:marker-style-name="T283"><text:span text:style-name="T283"><text:s text:c="2"/>Step 1：3 &lt; 6 → 3 為新 Root，遞迴 Merge(A.right=8, B=6)</text:span><text:span text:style-name="T283"/></text:p>
      <text:p text:style-name="P8"/>
      <text:p text:style-name="P8" loext:marker-style-name="T283"><text:span text:style-name="T283"><text:s text:c="2"/>Step 2：Merge(8, 6)：6 &lt; 8 → 6 為新 Root，遞迴 Merge(B.right=7, 8)</text:span><text:span text:style-name="T283"/></text:p>
      <text:p text:style-name="P8"/>
      <text:p text:style-name="P8" loext:marker-style-name="T283"><text:span text:style-name="T283"><text:s text:c="2"/>Step 3：Merge(7, 8)：7 &lt; 8 → 7 為新 Root</text:span><text:span text:style-name="T283"/></text:p>
      <text:p text:style-name="P8" loext:marker-style-name="T283"><text:span text:style-name="T283"><text:s text:c="11"/>Merge(null, 8) = 8 <text:s/>→ <text:s/>7.right = 8</text:span><text:span text:style-name="T283"/></text:p>
      <text:p text:style-name="P8" loext:marker-style-name="T283"><text:span text:style-name="T283"><text:s text:c="11"/>NPL(7.left=null)=-1 &lt; NPL(7.right=8)=0 <text:s/>→ <text:s/>交換左右！</text:span><text:span text:style-name="T283"/></text:p>
      <text:p text:style-name="P8" loext:marker-style-name="T283"><text:span text:style-name="T283"><text:s text:c="11"/>結果：7.left=8, 7.right=null, NPL(7)=0</text:span><text:span text:style-name="T283"/></text:p>
      <text:p text:style-name="P8" loext:marker-style-name="T283"><text:span text:style-name="T283"><text:s text:c="20"/>7</text:span><text:span text:style-name="T283"/></text:p>
      <text:p text:style-name="P8" loext:marker-style-name="T283"><text:span text:style-name="T283"><text:s text:c="19"/>/</text:span><text:span text:style-name="T283"/></text:p>
      <text:p text:style-name="P8" loext:marker-style-name="T283"><text:span text:style-name="T283"><text:s text:c="18"/>8</text:span><text:span text:style-name="T283"/></text:p>
      <text:p text:style-name="P8"/>
      <text:p text:style-name="P8" loext:marker-style-name="T283"><text:span text:style-name="T283"><text:s text:c="2"/>Step 4：回填 Merge(8,6)：6.left=12, 6.right=7</text:span><text:span text:style-name="T283"/></text:p>
      <text:p text:style-name="P8" loext:marker-style-name="T283"><text:span text:style-name="T283"><text:s text:c="11"/>NPL(12)=0 = NPL(7)=0 <text:s/>→ <text:s/>不需交換</text:span><text:span text:style-name="T283"/></text:p>
      <text:p text:style-name="P8" loext:marker-style-name="T283"><text:span text:style-name="T283"><text:s text:c="11"/>NPL(6) = min(0,0)+1 = 1</text:span><text:span text:style-name="T283"/></text:p>
      <text:p text:style-name="P8" loext:marker-style-name="T283"><text:span text:style-name="T283"><text:s text:c="20"/>6 <text:s/>[NPL=1]</text:span><text:span text:style-name="T283"/></text:p>
      <text:p text:style-name="P8" loext:marker-style-name="T283"><text:span text:style-name="T283"><text:s text:c="19"/>/ \</text:span><text:span text:style-name="T283"/></text:p>
      <text:p text:style-name="P8" loext:marker-style-name="T283"><text:span text:style-name="T283"><text:s text:c="17"/>12 <text:s text:c="2"/>7</text:span><text:span text:style-name="T283"/></text:p>
      <text:p text:style-name="P8" loext:marker-style-name="T283"><text:span text:style-name="T283"><text:s text:c="21"/>/</text:span><text:span text:style-name="T283"/></text:p>
      <text:p text:style-name="P8" loext:marker-style-name="T283"><text:span text:style-name="T283"><text:s text:c="20"/>8</text:span><text:span text:style-name="T283"/></text:p>
      <text:p text:style-name="P8"/>
      <text:p text:style-name="P8" loext:marker-style-name="T283"><text:span text:style-name="T283"><text:s text:c="2"/>Step 5：回填 Merge(A,B)：3.left=5, 3.right=6</text:span><text:span text:style-name="T283"/></text:p>
      <text:p text:style-name="P8" loext:marker-style-name="T283"><text:span text:style-name="T283"><text:s text:c="11"/>NPL(3.right=6)=1 &gt; NPL(3.left=5)=0 <text:s/>→ <text:s/>交換左右！</text:span><text:span text:style-name="T283"/></text:p>
      <text:p text:style-name="P44" loext:marker-style-name="T283"><text:span text:style-name="T283"><text:s text:c="11"/>NPL(3) = min(NPL(6),NPL(5))+1 = min(1,0)+1 = 1</text:span><text:span text:style-name="T283"/></text:p>
      <text:p text:style-name="P14"/>
      <text:p text:style-name="P10"><text:s text:c="2"/>最終合併結果（Min Leftist Heap）：</text:p>
      <text:p text:style-name="P8"/>
      <text:p text:style-name="P8" loext:marker-style-name="T283"><text:span text:style-name="T283"><text:s text:c="14"/>3 <text:s/>[NPL=1]</text:span><text:span text:style-name="T283"/></text:p>
      <text:p text:style-name="P8" loext:marker-style-name="T283"><text:span text:style-name="T283"><text:s text:c="13"/>/ \</text:span><text:span text:style-name="T283"/></text:p>
      <text:p text:style-name="P8" loext:marker-style-name="T283"><text:span text:style-name="T283"><text:s text:c="12"/>6 <text:s text:c="2"/>5 <text:s/>[NPL=0]</text:span><text:span text:style-name="T283"/></text:p>
      <text:p text:style-name="P8" loext:marker-style-name="T283"><text:span text:style-name="T283"><text:s text:c="11"/>/ \</text:span><text:span text:style-name="T283"/></text:p>
      <text:p text:style-name="P8" loext:marker-style-name="T283"><text:span text:style-name="T283"><text:s text:c="9"/>12 <text:s text:c="2"/>7 <text:s/>[NPL=0]</text:span><text:span text:style-name="T283"/></text:p>
      <text:p text:style-name="P8" loext:marker-style-name="T283"><text:span text:style-name="T283"><text:s text:c="13"/>/</text:span><text:span text:style-name="T283"/></text:p>
      <text:p text:style-name="P8" loext:marker-style-name="T283"><text:span text:style-name="T283"><text:s text:c="12"/>8</text:span><text:span text:style-name="T283"/></text:p>
      <text:p text:style-name="P8"/>
      <text:p text:style-name="P8" loext:marker-style-name="T283"><text:span text:style-name="T283"><text:s text:c="2"/>驗證 Min Heap：3&lt;6 ✓ <text:s/>3&lt;5 ✓ <text:s/>6&lt;12 ✓ <text:s/>6&lt;7 ✓ <text:s/>7&lt;8 ✓</text:span><text:span text:style-name="T283"/></text:p>
      <text:p text:style-name="P44" loext:marker-style-name="T283"><text:soft-page-break/><text:span text:style-name="T283"><text:s text:c="2"/>驗證左偏性：NPL(6)=1 ≥ NPL(5)=0 ✓ <text:s/>NPL(12)=0 ≥ NPL(7)=0 ✓</text:span><text:span text:style-name="T283"/></text:p>
      <text:p text:style-name="P12"/>
      <text:h text:style-name="P3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303"><text:span text:style-name="T304">操作</text:span><text:span text:style-name="T303"/></text:p>
          </table:table-cell>
          <table:table-cell table:style-name="表格47.A1" office:value-type="string">
            <text:p text:style-name="Standard" loext:marker-style-name="T303"><text:span text:style-name="T304">普通 </text:span><text:span text:style-name="T303">Binary Heap</text:span></text:p>
          </table:table-cell>
          <table:table-cell table:style-name="表格47.A1" office:value-type="string">
            <text:p text:style-name="Standard" loext:marker-style-name="T303"><text:span text:style-name="T303">Leftist Heap</text:span><text:span text:style-name="T303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81"><text:span text:style-name="T281">Insert</text:span><text:span text:style-name="T281"/></text:p>
          </table:table-cell>
          <table:table-cell table:style-name="表格47.A2" office:value-type="string">
            <text:p text:style-name="Standard" loext:marker-style-name="T281"><text:span text:style-name="T281">O(log n)</text:span><text:span text:style-name="T281"/></text:p>
          </table:table-cell>
          <table:table-cell table:style-name="表格47.A2" office:value-type="string">
            <text:p text:style-name="Standard" loext:marker-style-name="T281"><text:span text:style-name="T281">O(log n)</text:span><text:span text:style-name="T281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81"><text:span text:style-name="T281">Extract-Min/Max</text:span><text:span text:style-name="T281"/></text:p>
          </table:table-cell>
          <table:table-cell table:style-name="表格47.A3" office:value-type="string">
            <text:p text:style-name="Standard" loext:marker-style-name="T281"><text:span text:style-name="T281">O(log n)</text:span><text:span text:style-name="T281"/></text:p>
          </table:table-cell>
          <table:table-cell table:style-name="表格47.A3" office:value-type="string">
            <text:p text:style-name="Standard" loext:marker-style-name="T281"><text:span text:style-name="T281">O(log n)</text:span><text:span text:style-name="T28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81"><text:span text:style-name="T281">Merge</text:span><text:span text:style-name="T282">（合併兩個 </text:span><text:span text:style-name="T281">Heap</text:span><text:span text:style-name="T282">）</text:span></text:p>
          </table:table-cell>
          <table:table-cell table:style-name="表格47.A2" office:value-type="string">
            <text:p text:style-name="Standard" loext:marker-style-name="T281"><text:span text:style-name="T281">O(n+m) </text:span><text:span text:style-name="T282">重建</text:span></text:p>
          </table:table-cell>
          <table:table-cell table:style-name="表格47.A2" office:value-type="string">
            <text:p text:style-name="Standard" loext:marker-style-name="T281"><text:span text:style-name="T281">O(log n + log m) ★</text:span><text:span text:style-name="T281"/></text:p>
          </table:table-cell>
        </table:table-row>
      </table:table>
      <text:p text:style-name="P7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1" loext:marker-style-name="T249"><text:span text:style-name="T249">⚠️ <text:s/></text:span><text:span text:style-name="T250">重要：</text:span><text:span text:style-name="T249">Min vs. Max Leftist Heap</text:span></text:p>
            <text:p text:style-name="P11" loext:marker-style-name="T264"><text:span text:style-name="T264">Min Leftist Heap → Merge </text:span><text:span text:style-name="T265">時，較小的 </text:span><text:span text:style-name="T264">Root </text:span><text:span text:style-name="T265">成為新 </text:span><text:span text:style-name="T264">Root</text:span></text:p>
            <text:p text:style-name="P11" loext:marker-style-name="T264"><text:span text:style-name="T264">Max Leftist Heap → Merge </text:span><text:span text:style-name="T265">時，較大的 </text:span><text:span text:style-name="T264">Root </text:span><text:span text:style-name="T265">成為新 </text:span><text:span text:style-name="T264">Root</text:span></text:p>
            <text:p text:style-name="P46" loext:marker-style-name="T264"><text:span text:style-name="T265">演算法步驟完全相同，只有「誰當新 </text:span><text:span text:style-name="T264">Root</text:span><text:span text:style-name="T265">」的比較方向相反。</text:span></text:p>
          </table:table-cell>
        </table:table-row>
      </table:table>
      <text:h text:style-name="P17" text:outline-level="1" loext:marker-style-name="T243"/>
      <text:p text:style-name="P1"/>
      <text:h text:style-name="P15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3" loext:marker-style-name="T30"><text:span text:style-name="T31">這是許多考生最容易混淆的地方，必須徹底釐清各資料結構的設計目的。</text:span><text:span text:style-name="T30"/></text:p>
      <text:p text:style-name="P1"/>
      <text:h text:style-name="P18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2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2" loext:marker-style-name="T42"><text:span text:style-name="T49">BST</text:span><text:span text:style-name="T42"/></text:p>
          </table:table-cell>
          <table:table-cell table:style-name="表格49.A2" office:value-type="string">
            <text:p text:style-name="P32" loext:marker-style-name="T42"><text:span text:style-name="T60">快速搜尋特定值</text:span><text:span text:style-name="T42"/></text:p>
          </table:table-cell>
          <table:table-cell table:style-name="表格49.A2" office:value-type="string">
            <text:p text:style-name="P32" loext:marker-style-name="T42"><text:span text:style-name="T60">左 </text:span><text:span text:style-name="T49">&lt; </text:span><text:span text:style-name="T60">根 </text:span><text:span text:style-name="T49">&lt; </text:span><text:span text:style-name="T60">右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2"><text:span text:style-name="T49">AVL Tree</text:span><text:span text:style-name="T42"/></text:p>
          </table:table-cell>
          <table:table-cell table:style-name="表格49.A2" office:value-type="string">
            <text:p text:style-name="P32" loext:marker-style-name="T42"><text:span text:style-name="T60">平衡 </text:span><text:span text:style-name="T49">BST</text:span><text:span text:style-name="T60">，穩定搜尋</text:span></text:p>
          </table:table-cell>
          <table:table-cell table:style-name="表格49.A2" office:value-type="string">
            <text:p text:style-name="P32" loext:marker-style-name="T42"><text:span text:style-name="T60">高度差 ≤ </text:span><text:span text:style-name="T49">1</text:span><text:span text:style-name="T60">，</text:span><text:span text:style-name="T49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2"><text:span text:style-name="T49">Red-Black Tree</text:span><text:span text:style-name="T42"/></text:p>
          </table:table-cell>
          <table:table-cell table:style-name="表格49.A2" office:value-type="string">
            <text:p text:style-name="P32" loext:marker-style-name="T42"><text:span text:style-name="T60">平衡 </text:span><text:span text:style-name="T49">BST</text:span><text:span text:style-name="T60">，減少旋轉</text:span></text:p>
          </table:table-cell>
          <table:table-cell table:style-name="表格49.A2" office:value-type="string">
            <text:p text:style-name="P32" loext:marker-style-name="T42"><text:span text:style-name="T60">顏色規則，</text:span><text:span text:style-name="T49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2"><text:span text:style-name="T49">Heap</text:span><text:span text:style-name="T42"/></text:p>
          </table:table-cell>
          <table:table-cell table:style-name="表格49.A2" office:value-type="string">
            <text:p text:style-name="P32" loext:marker-style-name="T42"><text:span text:style-name="T60">快速取最大</text:span><text:span text:style-name="T49">/</text:span><text:span text:style-name="T60">最小值</text:span></text:p>
          </table:table-cell>
          <table:table-cell table:style-name="表格49.A2" office:value-type="string">
            <text:p text:style-name="P32" loext:marker-style-name="T42"><text:span text:style-name="T60">父 ≥ 子（</text:span><text:span text:style-name="T49">Max</text:span><text:span text:style-name="T60">）或父 ≤ 子（</text:span><text:span text:style-name="T49">Min</text:span><text:span text:style-name="T60">）</text:span></text:p>
          </table:table-cell>
        </table:table-row>
      </table:table>
      <text:p text:style-name="P1"/>
      <text:h text:style-name="P18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32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2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2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2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2" loext:marker-style-name="T42"><text:span text:style-name="T60">搜尋特定值</text:span><text:span text:style-name="T42"/></text:p>
          </table:table-cell>
          <table:table-cell table:style-name="表格50.A2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2" loext:marker-style-name="T42"><text:span text:style-name="T49">❌ O(n)</text:span><text:span text:style-name="T42"/></text:p>
          </table:table-cell>
          <table:table-cell table:style-name="表格50.A2" office:value-type="string">
            <text:p text:style-name="P32" loext:marker-style-name="T42"><text:span text:style-name="T49">Heap </text:span><text:span text:style-name="T60">無排序規則</text:span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2"><text:span text:style-name="T60">找最大值（</text:span><text:span text:style-name="T49">view</text:span><text:span text:style-name="T60">）</text:span></text:p>
          </table:table-cell>
          <table:table-cell table:style-name="表格50.A3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32" loext:marker-style-name="T42"><text:span text:style-name="T49">✅ O(1)</text:span><text:span text:style-name="T42"/></text:p>
          </table:table-cell>
          <table:table-cell table:style-name="表格50.A3" office:value-type="string">
            <text:p text:style-name="P32" loext:marker-style-name="T42"><text:span text:style-name="T49">Heap Root </text:span><text:span text:style-name="T60">即最大值</text:span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2"><text:span text:style-name="T49">Extract-Max</text:span><text:span text:style-name="T42"/></text:p>
          </table:table-cell>
          <table:table-cell table:style-name="表格50.A2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2" loext:marker-style-name="T42"><text:span text:style-name="T60">相同</text:span><text:span text:style-name="T42"/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2"><text:span text:style-name="T49">Insert</text:span><text:span text:style-name="T42"/></text:p>
          </table:table-cell>
          <table:table-cell table:style-name="表格50.A3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32" loext:marker-style-name="T42"><text:span text:style-name="T60">相同</text:span><text:span text:style-name="T42"/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2"><text:span text:style-name="T49">Delete </text:span><text:span text:style-name="T60">任意</text:span></text:p>
          </table:table-cell>
          <table:table-cell table:style-name="表格50.A2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2" loext:marker-style-name="T42"><text:span text:style-name="T49">O(n) </text:span><text:span text:style-name="T60">找 </text:span><text:span text:style-name="T49">+ O(log n) </text:span><text:span text:style-name="T60">刪</text:span></text:p>
          </table:table-cell>
          <table:table-cell table:style-name="表格50.A2" office:value-type="string">
            <text:p text:style-name="P32" loext:marker-style-name="T42"><text:span text:style-name="T49">Heap </text:span><text:span text:style-name="T60">找到要刪的節點要 </text:span><text:span text:style-name="T49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" loext:marker-style-name="T42"><text:span text:style-name="T49">⚠️ <text:s/></text:span><text:span text:style-name="T60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2"><text:span text:style-name="T60">「</text:span><text:span text:style-name="T49">Max Heap </text:span><text:span text:style-name="T60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2"><text:span text:style-name="T49">❌ </text:span><text:span text:style-name="T60">錯誤答案：</text:span><text:span text:style-name="T49">O(log n) <text:s/>← </text:span><text:span text:style-name="T60">看到樹就聯想 </text:span><text:span text:style-name="T49">log n </text:span><text:span text:style-name="T60">是常見誤區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2"><text:span text:style-name="T49">✅ </text:span><text:span text:style-name="T60">正確答案：</text:span><text:span text:style-name="T49">O(n)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2"><text:span text:style-name="T60">原因：</text:span><text:span text:style-name="T49">Heap </text:span><text:span text:style-name="T60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2"><text:span text:style-name="T49"><text:s text:c="6"/></text:span><text:span text:style-name="T60">最壞情況需掃描所有節點。</text:span></text:p>
          </table:table-cell>
        </table:table-row>
      </table:table>
      <text:p text:style-name="P1"/>
      <text:h text:style-name="P18" text:outline-level="2" loext:marker-style-name="T17"><text:span text:style-name="T18">為什麼 </text:span><text:span text:style-name="T26">Linux</text:span><text:span text:style-name="T27"> </text:span><text:span text:style-name="T18">選擇 </text:span><text:span text:style-name="T26">Red-Black Tree</text:span><text:span text:style-name="T27"> </text:span><text:span text:style-name="T18">而非 </text:span><text:span text:style-name="T26">AVL</text:span><text:span text:style-name="T18">？</text:span></text:h>
      <text:list text:continue-list="list3819085238" text:style-name="WWNum2">
        <text:list-item>
          <text:p text:style-name="P40" loext:marker-style-name="T30"><text:span text:style-name="T48">AVL</text:span><text:span text:style-name="T31">：搜尋最快，但插入</text:span><text:span text:style-name="T48">/</text:span><text:span text:style-name="T31">刪除旋轉次數多，修改成本高。</text:span></text:p>
        </text:list-item>
        <text:list-item>
          <text:p text:style-name="P40" loext:marker-style-name="T30"><text:span text:style-name="T48">Red-Black Tree</text:span><text:span text:style-name="T31">：搜尋稍慢，但插入</text:span><text:span text:style-name="T48">/</text:span><text:span text:style-name="T31">刪除旋轉較少，整體效能均衡。</text:span></text:p>
        </text:list-item>
        <text:list-item>
          <text:p text:style-name="P40" loext:marker-style-name="T30"><text:span text:style-name="T48">Linux Kernel </text:span><text:span text:style-name="T31">的 </text:span><text:span text:style-name="T48">CFS </text:span><text:span text:style-name="T31">排程器、記憶體管理（</text:span><text:span text:style-name="T48">VMA</text:span><text:span text:style-name="T31">）、</text:span><text:span text:style-name="T48">Timer </text:span><text:span text:style-name="T31">均採用 </text:span><text:span text:style-name="T48">Red-Black Tree</text:span><text:span text:style-name="T31">。</text:span></text:p>
        </text:list-item>
      </text:list>
      <text:p text:style-name="P1"/>
      <text:p text:style-name="P1"/>
      <text:h text:style-name="P15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1</text:span><text:span text:style-name="T60">：</text:span><text:span text:style-name="T49">Heap </text:span><text:span text:style-name="T60">搜尋 ≠ </text:span><text:span text:style-name="T49">O(log n)</text:span><text:span text:style-name="T60">，正確為 </text:span><text:span text:style-name="T49">O(n)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2</text:span><text:span text:style-name="T60">：</text:span><text:span text:style-name="T49">Build Heap ≠ O(n log n)</text:span><text:span text:style-name="T60">，</text:span><text:span text:style-name="T49">Bottom-Up </text:span><text:span text:style-name="T60">法正確為 </text:span><text:span text:style-name="T49">O(n)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3</text:span><text:span text:style-name="T60">：</text:span><text:span text:style-name="T49">Heap </text:span><text:span text:style-name="T60">是 </text:span><text:span text:style-name="T49">Complete Binary Tree</text:span><text:span text:style-name="T60">，不是 </text:span><text:span text:style-name="T49">Full Binary Tree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ext:soft-page-break/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4</text:span><text:span text:style-name="T60">：陣列索引從 </text:span><text:span text:style-name="T49">1 </text:span><text:span text:style-name="T60">開始，</text:span><text:span text:style-name="T49">parent = ⌊i/2⌋</text:span><text:span text:style-name="T60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5</text:span><text:span text:style-name="T60">：</text:span><text:span text:style-name="T49">Interval Heap </text:span><text:span text:style-name="T60">每個節點存的是區間 </text:span><text:span text:style-name="T49">[min, max]</text:span><text:span text:style-name="T60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6</text:span><text:span text:style-name="T60">：</text:span><text:span text:style-name="T49">Merge Leftist Heap </text:span><text:span text:style-name="T60">的新 </text:span><text:span text:style-name="T49">Root </text:span><text:span text:style-name="T60">是兩個 </text:span><text:span text:style-name="T49">Root </text:span><text:span text:style-name="T60">中較小的（</text:span><text:span text:style-name="T49">Min Heap</text:span><text:span text:style-name="T60">），</text:span></text:p>
          </table:table-cell>
        </table:table-row>
        <table:table-row table:style-name="表格52.1">
          <table:table-cell table:style-name="表格52.A1" office:value-type="string">
            <text:p text:style-name="P4" loext:marker-style-name="T42"><text:span text:style-name="T49"><text:s text:c="8"/>Max Leftist Heap </text:span><text:span text:style-name="T60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7</text:span><text:span text:style-name="T60">：</text:span><text:span text:style-name="T49">Heap Sort </text:span><text:span text:style-name="T60">是 </text:span><text:span text:style-name="T49">Unstable Sort</text:span><text:span text:style-name="T60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2"><text:span text:style-name="T60">陷阱 </text:span><text:span text:style-name="T49">8</text:span><text:span text:style-name="T60">：</text:span><text:span text:style-name="T49">Heap Sort </text:span><text:span text:style-name="T60">空間複雜度是 </text:span><text:span text:style-name="T49">O(1)</text:span><text:span text:style-name="T60">（</text:span><text:span text:style-name="T49">In-place</text:span><text:span text:style-name="T60">），不需額外空間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十一、考試必背速查表（最終記憶版）</text:span><text:span text:style-name="T3"/></text:h>
      <text:p text:style-name="P1"/>
      <text:h text:style-name="P18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" loext:marker-style-name="T42"><text:span text:style-name="T49">Heap = Complete Binary Tree + Heap Property</text:span><text:span text:style-name="T60">（</text:span><text:span text:style-name="T49">parent ≤/≥ child</text:span><text:span text:style-name="T60">）</text:span></text:p>
          </table:table-cell>
        </table:table-row>
        <table:table-row table:style-name="表格53.1">
          <table:table-cell table:style-name="表格53.A1" office:value-type="string">
            <text:p text:style-name="P4"/>
          </table:table-cell>
        </table:table-row>
        <table:table-row table:style-name="表格53.1">
          <table:table-cell table:style-name="表格53.A1" office:value-type="string">
            <text:p text:style-name="P4" loext:marker-style-name="T42"><text:span text:style-name="T60">陣列索引（從 </text:span><text:span text:style-name="T49">1 </text:span><text:span text:style-name="T60">起）：</text:span></text:p>
          </table:table-cell>
        </table:table-row>
        <table:table-row table:style-name="表格53.1">
          <table:table-cell table:style-name="表格53.A1" office:value-type="string">
            <text:p text:style-name="P4" loext:marker-style-name="T42"><text:span text:style-name="T49"><text:s text:c="2"/>Root <text:s text:c="4"/>= A[1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2"><text:span text:style-name="T49"><text:s text:c="2"/>Parent(i) = A[⌊i/2⌋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2"><text:span text:style-name="T49"><text:s text:c="2"/>Left(i) <text:s/>= A[2i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2"><text:span text:style-name="T49"><text:s text:c="2"/>Right(i) = A[2i+1]</text:span><text:span text:style-name="T42"/></text:p>
          </table:table-cell>
        </table:table-row>
      </table:table>
      <text:p text:style-name="P1"/>
      <text:h text:style-name="P18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2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2" loext:marker-style-name="T42"><text:span text:style-name="T49">Insert</text:span><text:span text:style-name="T60">（</text:span><text:span text:style-name="T49">Bubble Up</text:span><text:span text:style-name="T60">）</text:span></text:p>
          </table:table-cell>
          <table:table-cell table:style-name="表格54.A2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4.A2" office:value-type="string">
            <text:p text:style-name="P32" loext:marker-style-name="T42"><text:span text:style-name="T60">最多走 </text:span><text:span text:style-name="T49">h = log n </text:span><text:span text:style-name="T60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2"><text:span text:style-name="T49">Extract-Max</text:span><text:span text:style-name="T60">（</text:span><text:span text:style-name="T49">Heapify</text:span><text:span text:style-name="T60">）</text:span></text:p>
          </table:table-cell>
          <table:table-cell table:style-name="表格54.A2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4.A2" office:value-type="string">
            <text:p text:style-name="P32" loext:marker-style-name="T42"><text:span text:style-name="T60">最多走 </text:span><text:span text:style-name="T49">h = log n </text:span><text:span text:style-name="T60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2"><text:span text:style-name="T49">Build Heap</text:span><text:span text:style-name="T60">（</text:span><text:span text:style-name="T49">Bottom-Up</text:span><text:span text:style-name="T60">）</text:span></text:p>
          </table:table-cell>
          <table:table-cell table:style-name="表格54.A2" office:value-type="string">
            <text:p text:style-name="P32" loext:marker-style-name="T42"><text:span text:style-name="T49">O(n) ★</text:span><text:span text:style-name="T42"/></text:p>
          </table:table-cell>
          <table:table-cell table:style-name="表格54.A2" office:value-type="string">
            <text:p text:style-name="P32" loext:marker-style-name="T42"><text:span text:style-name="T49">Floyd </text:span><text:span text:style-name="T60">演算法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2"><text:span text:style-name="T60">逐個 </text:span><text:span text:style-name="T49">Insert </text:span><text:span text:style-name="T60">建 </text:span><text:span text:style-name="T49">Heap</text:span></text:p>
          </table:table-cell>
          <table:table-cell table:style-name="表格54.A2" office:value-type="string">
            <text:p text:style-name="P32" loext:marker-style-name="T42"><text:span text:style-name="T49">O(n log n)</text:span><text:span text:style-name="T42"/></text:p>
          </table:table-cell>
          <table:table-cell table:style-name="表格54.A2" office:value-type="string">
            <text:p text:style-name="P32" loext:marker-style-name="T42"><text:span text:style-name="T49">n </text:span><text:span text:style-name="T60">次 </text:span><text:span text:style-name="T49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32" loext:marker-style-name="T42"><text:span text:style-name="T49">Heap Sort</text:span><text:span text:style-name="T42"/></text:p>
          </table:table-cell>
          <table:table-cell table:style-name="表格54.A2" office:value-type="string">
            <text:p text:style-name="P32" loext:marker-style-name="T42"><text:span text:style-name="T49">O(n log n)</text:span><text:span text:style-name="T42"/></text:p>
          </table:table-cell>
          <table:table-cell table:style-name="表格54.A2" office:value-type="string">
            <text:p text:style-name="P32" loext:marker-style-name="T42"><text:span text:style-name="T49">O(n) + O(n log n)</text:span><text:span text:style-name="T42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2"><text:span text:style-name="T60">搜尋特定值</text:span><text:span text:style-name="T42"/></text:p>
          </table:table-cell>
          <table:table-cell table:style-name="表格54.A2" office:value-type="string">
            <text:p text:style-name="P32" loext:marker-style-name="T42"><text:span text:style-name="T49">O(n)</text:span><text:span text:style-name="T42"/></text:p>
          </table:table-cell>
          <table:table-cell table:style-name="表格54.A2" office:value-type="string">
            <text:p text:style-name="P32" loext:marker-style-name="T42"><text:span text:style-name="T60">無左右排序規則</text:span><text:span text:style-name="T42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2"><text:span text:style-name="T49">Merge (Leftist Heap)</text:span><text:span text:style-name="T42"/></text:p>
          </table:table-cell>
          <table:table-cell table:style-name="表格54.A2" office:value-type="string">
            <text:p text:style-name="P32" loext:marker-style-name="T42"><text:span text:style-name="T49">O(log n + log m)</text:span><text:span text:style-name="T42"/></text:p>
          </table:table-cell>
          <table:table-cell table:style-name="表格54.A2" office:value-type="string">
            <text:p text:style-name="P32" loext:marker-style-name="T42"><text:span text:style-name="T60">右側路徑短</text:span><text:span text:style-name="T42"/></text:p>
          </table:table-cell>
        </table:table-row>
      </table:table>
      <text:p text:style-name="P1"/>
      <text:h text:style-name="P18" text:outline-level="2" loext:marker-style-name="T17"><text:span text:style-name="T27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2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 loext:marker-style-name="T42"><text:span text:style-name="T60">排序陣列</text:span><text:span text:style-name="T42"/></text:p>
          </table:table-cell>
          <table:table-cell table:style-name="表格55.A2" office:value-type="string">
            <text:p text:style-name="P32" loext:marker-style-name="T42"><text:span text:style-name="T49">O(n)</text:span><text:span text:style-name="T42"/></text:p>
          </table:table-cell>
          <table:table-cell table:style-name="表格55.A2" office:value-type="string">
            <text:p text:style-name="P32" loext:marker-style-name="T42"><text:span text:style-name="T49">O(1) <text:s/></text:span><text:span text:style-name="T60">取快插慢</text:span></text:p>
          </table:table-cell>
        </table:table-row>
        <table:table-row table:style-name="表格55.1">
          <table:table-cell table:style-name="表格55.A2" office:value-type="string">
            <text:p text:style-name="P32" loext:marker-style-name="T42"><text:span text:style-name="T60">未排序陣列</text:span><text:span text:style-name="T42"/></text:p>
          </table:table-cell>
          <table:table-cell table:style-name="表格55.A2" office:value-type="string">
            <text:p text:style-name="P32" loext:marker-style-name="T42"><text:span text:style-name="T49">O(1)</text:span><text:span text:style-name="T42"/></text:p>
          </table:table-cell>
          <table:table-cell table:style-name="表格55.A2" office:value-type="string">
            <text:p text:style-name="P32" loext:marker-style-name="T42"><text:span text:style-name="T49">O(n) <text:s/></text:span><text:span text:style-name="T60">插快取慢</text:span></text:p>
          </table:table-cell>
        </table:table-row>
        <table:table-row table:style-name="表格55.1">
          <table:table-cell table:style-name="表格55.A4" office:value-type="string">
            <text:p text:style-name="P32" loext:marker-style-name="T42"><text:span text:style-name="T49">Max Heap ★</text:span><text:span text:style-name="T42"/></text:p>
          </table:table-cell>
          <table:table-cell table:style-name="表格55.A4" office:value-type="string">
            <text:p text:style-name="P32" loext:marker-style-name="T42"><text:span text:style-name="T49">O(log n)</text:span><text:span text:style-name="T42"/></text:p>
          </table:table-cell>
          <table:table-cell table:style-name="表格55.A4" office:value-type="string">
            <text:p text:style-name="P32" loext:marker-style-name="T42"><text:span text:style-name="T49">O(log n) <text:s/></text:span><text:span text:style-name="T60">最均衡</text:span></text:p>
          </table:table-cell>
        </table:table-row>
      </table:table>
      <text:p text:style-name="P1"/>
      <text:h text:style-name="P18" text:outline-level="2" loext:marker-style-name="T17"><text:span text:style-name="T27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4" loext:marker-style-name="T42"><text:span text:style-name="T49">1. <text:s/>Heap = Complete BT + Heap Property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2"><text:span text:style-name="T49">2. <text:s/>parent = A[⌊i/2⌋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2"><text:span text:style-name="T49">3. <text:s/>left child = A[2i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2"><text:span text:style-name="T49">4. <text:s/>right child = A[2i+1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2"><text:span text:style-name="T49">5. <text:s/>Insert → Bubble Up → O(log n)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2"><text:span text:style-name="T49">6. <text:s/>Delete/Extract → Heapify</text:span><text:span text:style-name="T60">（</text:span><text:span text:style-name="T49">Bubble Down</text:span><text:span text:style-name="T60">）→ </text:span><text:span text:style-name="T49">O(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2"><text:span text:style-name="T49">7. <text:s/>Build Heap</text:span><text:span text:style-name="T60">（</text:span><text:span text:style-name="T49">Bottom-Up</text:span><text:span text:style-name="T60">）</text:span><text:span text:style-name="T49">= O(n) <text:s/>★ </text:span><text:span text:style-name="T60">非 </text:span><text:span text:style-name="T49">O(n 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2"><text:span text:style-name="T49">8. <text:s/>Heap Sort = O(n log n)</text:span><text:span text:style-name="T60">，</text:span><text:span text:style-name="T49">In-place</text:span><text:span text:style-name="T60">，</text:span><text:span text:style-name="T49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5T14:39:27.943000000</dc:date>
    <meta:editing-cycles>224</meta:editing-cycles>
    <meta:editing-duration>P1DT3H9M2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1" meta:paragraph-count="843" meta:word-count="7622" meta:character-count="19999" meta:non-whitespace-character-count="13218"/>
    <meta:user-defined meta:name="AppVersion">15.0000</meta:user-defined>
  </office:meta>
</office:document-meta>
</file>