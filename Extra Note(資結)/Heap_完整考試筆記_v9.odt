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5.A35" style:family="table-cell">
      <style:table-cell-properties fo:background-color="#ff4081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1" style:family="table">
      <style:table-properties style:width="15.921cm" fo:margin-left="0.071cm" fo:margin-top="0cm" fo:margin-bottom="0cm" table:align="left" style:writing-mode="page"/>
    </style:style>
    <style:style style:name="表格M1.A" style:family="table-column">
      <style:table-column-properties style:column-width="15.921cm"/>
    </style:style>
    <style:style style:name="表格M1.1" style:family="table-row">
      <style:table-row-properties fo:keep-together="auto"/>
    </style:style>
    <style:style style:name="表格M1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M2" style:family="table">
      <style:table-properties style:width="15.921cm" fo:margin-left="0.071cm" fo:margin-top="0cm" fo:margin-bottom="0cm" table:align="left" style:writing-mode="page"/>
    </style:style>
    <style:style style:name="表格M2.A" style:family="table-column">
      <style:table-column-properties style:column-width="15.921cm"/>
    </style:style>
    <style:style style:name="表格M2.1" style:family="table-row">
      <style:table-row-properties fo:keep-together="auto"/>
    </style:style>
    <style:style style:name="表格M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M3" style:family="table">
      <style:table-properties style:width="15.921cm" fo:margin-left="0.071cm" fo:margin-top="0cm" fo:margin-bottom="0cm" table:align="left" style:writing-mode="page"/>
    </style:style>
    <style:style style:name="表格M3.A" style:family="table-column">
      <style:table-column-properties style:column-width="15.921cm"/>
    </style:style>
    <style:style style:name="表格M3.1" style:family="table-row">
      <style:table-row-properties fo:keep-together="auto"/>
    </style:style>
    <style:style style:name="表格M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4" style:family="table">
      <style:table-properties style:width="15.921cm" fo:margin-left="0.071cm" fo:margin-top="0cm" fo:margin-bottom="0cm" table:align="left" style:writing-mode="page"/>
    </style:style>
    <style:style style:name="表格M4.A" style:family="table-column">
      <style:table-column-properties style:column-width="15.921cm"/>
    </style:style>
    <style:style style:name="表格M4.1" style:family="table-row">
      <style:table-row-properties fo:keep-together="auto"/>
    </style:style>
    <style:style style:name="表格M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5" style:family="table">
      <style:table-properties style:width="15.921cm" fo:margin-left="0.071cm" fo:margin-top="0cm" fo:margin-bottom="0cm" table:align="left" style:writing-mode="page"/>
    </style:style>
    <style:style style:name="表格M5.A" style:family="table-column">
      <style:table-column-properties style:column-width="15.921cm"/>
    </style:style>
    <style:style style:name="表格M5.1" style:family="table-row">
      <style:table-row-properties fo:keep-together="auto"/>
    </style:style>
    <style:style style:name="表格M5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M6" style:family="table">
      <style:table-properties style:width="15.921cm" fo:margin-left="0.071cm" fo:margin-top="0cm" fo:margin-bottom="0cm" table:align="left" style:writing-mode="page"/>
    </style:style>
    <style:style style:name="表格M6.A" style:family="table-column">
      <style:table-column-properties style:column-width="15.921cm"/>
    </style:style>
    <style:style style:name="表格M6.1" style:family="table-row">
      <style:table-row-properties fo:keep-together="auto"/>
    </style:style>
    <style:style style:name="表格M6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N1" style:family="table">
      <style:table-properties style:width="15.921cm" fo:margin-left="0.071cm" fo:margin-top="0cm" fo:margin-bottom="0cm" table:align="left" style:writing-mode="page"/>
    </style:style>
    <style:style style:name="表格N1.A" style:family="table-column">
      <style:table-column-properties style:column-width="15.921cm"/>
    </style:style>
    <style:style style:name="表格N1.1" style:family="table-row">
      <style:table-row-properties fo:keep-together="auto"/>
    </style:style>
    <style:style style:name="表格N1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M8" style:family="table">
      <style:table-properties style:width="15.921cm" fo:margin-left="0.071cm" fo:margin-top="0cm" fo:margin-bottom="0cm" table:align="left" style:writing-mode="page"/>
    </style:style>
    <style:style style:name="表格M8.A" style:family="table-column">
      <style:table-column-properties style:column-width="15.921cm"/>
    </style:style>
    <style:style style:name="表格M8.1" style:family="table-row">
      <style:table-row-properties fo:keep-together="auto"/>
    </style:style>
    <style:style style:name="表格M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M9" style:family="table">
      <style:table-properties style:width="15.921cm" fo:margin-left="0.071cm" fo:margin-top="0cm" fo:margin-bottom="0cm" table:align="left" style:writing-mode="page"/>
    </style:style>
    <style:style style:name="表格M9.A" style:family="table-column">
      <style:table-column-properties style:column-width="15.921cm"/>
    </style:style>
    <style:style style:name="表格M9.1" style:family="table-row">
      <style:table-row-properties fo:keep-together="auto"/>
    </style:style>
    <style:style style:name="表格M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X1" style:family="table">
      <style:table-properties style:width="15.921cm" fo:margin-left="0.071cm" fo:margin-top="0cm" fo:margin-bottom="0cm" table:align="left" style:writing-mode="page"/>
    </style:style>
    <style:style style:name="表格X1.A" style:family="table-column">
      <style:table-column-properties style:column-width="15.921cm"/>
    </style:style>
    <style:style style:name="表格X1.1" style:family="table-row">
      <style:table-row-properties fo:keep-together="auto"/>
    </style:style>
    <style:style style:name="表格X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X2" style:family="table">
      <style:table-properties style:width="15.921cm" fo:margin-left="0.071cm" fo:margin-top="0cm" fo:margin-bottom="0cm" table:align="left" style:writing-mode="page"/>
    </style:style>
    <style:style style:name="表格X2.A" style:family="table-column">
      <style:table-column-properties style:column-width="15.921cm"/>
    </style:style>
    <style:style style:name="表格X2.1" style:family="table-row">
      <style:table-row-properties fo:keep-together="auto"/>
    </style:style>
    <style:style style:name="表格X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X3" style:family="table">
      <style:table-properties style:width="15.921cm" fo:margin-left="0.071cm" fo:margin-top="0cm" fo:margin-bottom="0cm" table:align="left" style:writing-mode="page"/>
    </style:style>
    <style:style style:name="表格X3.A" style:family="table-column">
      <style:table-column-properties style:column-width="15.921cm"/>
    </style:style>
    <style:style style:name="表格X3.1" style:family="table-row">
      <style:table-row-properties fo:keep-together="auto"/>
    </style:style>
    <style:style style:name="表格X3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X4" style:family="table">
      <style:table-properties style:width="15.921cm" fo:margin-left="0.071cm" fo:margin-top="0cm" fo:margin-bottom="0cm" table:align="left" style:writing-mode="page"/>
    </style:style>
    <style:style style:name="表格X4.A" style:family="table-column">
      <style:table-column-properties style:column-width="15.921cm"/>
    </style:style>
    <style:style style:name="表格X4.1" style:family="table-row">
      <style:table-row-properties fo:keep-together="auto"/>
    </style:style>
    <style:style style:name="表格X4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M11" style:family="table">
      <style:table-properties style:width="15.921cm" fo:margin-left="0.071cm" fo:margin-top="0cm" fo:margin-bottom="0cm" table:align="left" style:writing-mode="page"/>
    </style:style>
    <style:style style:name="表格M11.A" style:family="table-column">
      <style:table-column-properties style:column-width="15.921cm"/>
    </style:style>
    <style:style style:name="表格M11.1" style:family="table-row">
      <style:table-row-properties fo:keep-together="auto"/>
    </style:style>
    <style:style style:name="表格M11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.071cm" style:contextual-spacing="false"/>
    </style:style>
    <style:style style:name="P2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3" style:family="paragraph" style:parent-style-name="Standard">
      <style:paragraph-properties fo:margin-top="0.053cm" fo:margin-bottom="0.053cm" style:contextual-spacing="false"/>
    </style:style>
    <style:style style:name="P4" style:family="paragraph" style:parent-style-name="Standard">
      <style:paragraph-properties fo:margin-top="0.053cm" fo:margin-bottom="0.053cm" style:contextual-spacing="false"/>
      <style:text-properties fo:color="#ffea00" loext:opacity="100%" fo:font-weight="bold" fo:background-color="#bf360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ea00" loext:opacity="100%" fo:background-color="#311b92"/>
    </style:style>
    <style:style style:name="P6" style:family="paragraph" style:parent-style-name="Standard">
      <style:paragraph-properties fo:margin-top="0cm" fo:margin-bottom="0.212cm" style:contextual-spacing="false"/>
    </style:style>
    <style:style style:name="P7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8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9" style:family="paragraph" style:parent-style-name="Standard">
      <style:paragraph-properties fo:margin-top="0cm" fo:margin-bottom="0.141cm" style:contextual-spacing="false"/>
    </style:style>
    <style:style style:name="P10" style:family="paragraph" style:parent-style-name="Standard">
      <style:paragraph-properties fo:margin-top="0cm" fo:margin-bottom="0.282cm" style:contextual-spacing="false"/>
    </style:style>
    <style:style style:name="P11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fo:color="#ffab40" loext:opacity="100%" fo:font-weight="bold" fo:background-color="#311b92" style:font-weight-asian="bold" style:font-weight-complex="bold"/>
    </style:style>
    <style:style style:name="P13" style:family="paragraph" style:parent-style-name="Standard">
      <style:text-properties fo:color="#ffff00" loext:opacity="100%" style:font-name="Arial1" fo:font-size="11pt" fo:font-weight="bold" fo:background-color="#ff9100" style:font-name-asian="Arial2" style:font-size-asian="11pt" style:font-weight-asian="bold" style:font-name-complex="Arial2" style:font-size-complex="11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fo:color="#ffff00" loext:opacity="100%" style:font-name="Arial1" fo:font-size="12pt" fo:font-weight="bold" fo:background-color="#ff9100" style:font-size-asian="12pt" style:font-weight-asian="bold" style:font-name-complex="Arial2" style:font-size-complex="12pt" style:font-weight-complex="bold"/>
    </style:style>
    <style:style style:name="P15" style:family="paragraph" style:parent-style-name="Standard">
      <style:paragraph-properties fo:margin-top="0cm" fo:margin-bottom="0.282cm" style:contextual-spacing="false"/>
      <style:text-properties fo:color="#ffff00" loext:opacity="100%" fo:font-weight="bold" fo:background-color="#ff9100" style:font-weight-asian="bold" style:font-weight-complex="bold"/>
    </style:style>
    <style:style style:name="P16" style:family="paragraph" style:parent-style-name="Standard">
      <style:text-properties fo:color="#f8bbd0" loext:opacity="100%" style:font-name="Arial1" fo:font-size="11pt" fo:font-weight="bold" fo:background-color="#880e4f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18" style:family="paragraph" style:parent-style-name="Heading_20_2">
      <style:paragraph-properties fo:margin-left="0cm" fo:margin-right="0cm" fo:margin-top="0.529cm" fo:margin-bottom="0.247cm" style:contextual-spacing="false" fo:text-indent="0cm" style:auto-text-indent="false"/>
    </style:style>
    <style:style style:name="P19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20" style:family="paragraph" style:parent-style-name="Heading_20_1">
      <style:paragraph-properties fo:margin-left="0cm" fo:margin-righ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21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22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23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24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25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26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27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28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29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30" style:family="paragraph" style:parent-style-name="List_20_Paragraph" style:list-style-name="WWNum14">
      <style:paragraph-properties fo:margin-top="0cm" fo:margin-bottom="0.141cm" style:contextual-spacing="false"/>
    </style:style>
    <style:style style:name="P3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32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margin-top="0.106cm" fo:margin-bottom="0.106cm" style:contextual-spacing="false"/>
    </style:style>
    <style:style style:name="P35" style:family="paragraph" style:parent-style-name="Standard">
      <style:paragraph-properties fo:margin-top="0.053cm" fo:margin-bottom="0.053cm" style:contextual-spacing="false"/>
    </style:style>
    <style:style style:name="P36" style:family="paragraph" style:parent-style-name="Standard">
      <style:paragraph-properties fo:margin-top="0.318cm" fo:margin-bottom="0.106cm" style:contextual-spacing="false"/>
    </style:style>
    <style:style style:name="P37" style:family="paragraph" style:parent-style-name="Standard">
      <style:paragraph-properties fo:margin-top="0.053cm" fo:margin-bottom="0.053cm" style:contextual-spacing="false"/>
      <style:text-properties officeooo:paragraph-rsid="00542c65"/>
    </style:style>
    <style:style style:name="P38" style:family="paragraph" style:parent-style-name="Standard">
      <style:paragraph-properties fo:margin-top="0.053cm" fo:margin-bottom="0.053cm" style:contextual-spacing="false"/>
      <style:text-properties officeooo:paragraph-rsid="00554de0"/>
    </style:style>
    <style:style style:name="P39" style:family="paragraph" style:parent-style-name="Standard">
      <style:paragraph-properties fo:margin-top="0.053cm" fo:margin-bottom="0.053cm" style:contextual-spacing="false"/>
      <style:text-properties officeooo:paragraph-rsid="005ccf35"/>
    </style:style>
    <style:style style:name="P40" style:family="paragraph" style:parent-style-name="Standard">
      <style:paragraph-properties fo:margin-top="0.106cm" fo:margin-bottom="0.106cm" style:contextual-spacing="false"/>
      <style:text-properties officeooo:paragraph-rsid="00661972"/>
    </style:style>
    <style:style style:name="P41" style:family="paragraph" style:parent-style-name="Standard" style:list-style-name="WWNum2">
      <style:paragraph-properties fo:margin-top="0.071cm" fo:margin-bottom="0.071cm" style:contextual-spacing="false"/>
    </style:style>
    <style:style style:name="P42" style:family="paragraph" style:parent-style-name="Standard">
      <style:paragraph-properties fo:margin-top="0cm" fo:margin-bottom="0.212cm" style:contextual-spacing="false"/>
    </style:style>
    <style:style style:name="P43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44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45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46" style:family="paragraph" style:parent-style-name="Standard">
      <style:paragraph-properties fo:margin-top="0cm" fo:margin-bottom="0.141cm" style:contextual-spacing="false"/>
    </style:style>
    <style:style style:name="P47" style:family="paragraph" style:parent-style-name="Standard">
      <style:paragraph-properties fo:margin-top="0cm" fo:margin-bottom="0cm" style:contextual-spacing="false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5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7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9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1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12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4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6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17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8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20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22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23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24" style:family="text">
      <style:text-properties fo:color="#2e75b6" loext:opacity="100%" style:font-name="Arial1" fo:font-size="15pt" fo:font-weight="bold" fo:background-color="#ff6e40" loext:char-shading-value="0" style:font-size-asian="15pt" style:font-weight-asian="bold" style:font-name-complex="Arial2" style:font-size-complex="15pt" style:font-weight-complex="bold"/>
    </style:style>
    <style:style style:name="T25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6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7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28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30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31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32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33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34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35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36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37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9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40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41" style:family="text">
      <style:text-properties fo:color="#595959" loext:opacity="100%" style:font-name="Arial1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43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44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5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6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47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48" style:family="text">
      <style:text-properties fo:color="#595959" loext:opacity="100%" fo:font-size="11pt" style:font-size-asian="11pt" style:font-name-complex="Arial2" style:font-size-complex="11pt"/>
    </style:style>
    <style:style style:name="T49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50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51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52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3" style:family="text">
      <style:text-properties fo:color="#595959" loext:opacity="100%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54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5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56" style:family="text">
      <style:text-properties fo:color="#595959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7" style:family="text">
      <style:text-properties fo:color="#595959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58" style:family="text">
      <style:text-properties fo:color="#595959" loext:opacity="100%" fo:font-size="10.5pt" fo:font-weight="bold" fo:background-color="#ffc400" loext:char-shading-value="0" style:font-name-asian="Arial2" style:font-size-asian="10.5pt" style:font-weight-asian="bold" style:font-name-complex="Arial2" style:font-size-complex="10.5pt" style:font-weight-complex="bold"/>
    </style:style>
    <style:style style:name="T59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60" style:family="text">
      <style:text-properties fo:color="#595959" loext:opacity="100%" fo:font-size="10.5pt" style:font-size-asian="10.5pt" style:font-name-complex="Arial2" style:font-size-complex="10.5pt"/>
    </style:style>
    <style:style style:name="T61" style:family="text">
      <style:text-properties fo:color="#595959" loext:opacity="100%" fo:font-size="10.5pt" fo:background-color="#0d47a1" loext:char-shading-value="0" style:font-name-asian="Arial2" style:font-size-asian="10.5pt" style:font-name-complex="Arial2" style:font-size-complex="10.5pt"/>
    </style:style>
    <style:style style:name="T62" style:family="text">
      <style:text-properties fo:color="#595959" loext:opacity="100%" fo:font-size="10.5pt" fo:background-color="#ffff00" loext:char-shading-value="0" style:font-size-asian="10.5pt" style:font-name-complex="Arial2" style:font-size-complex="10.5pt"/>
    </style:style>
    <style:style style:name="T63" style:family="text">
      <style:text-properties fo:color="#595959" loext:opacity="100%" fo:font-size="10.5pt" fo:background-color="#ffff00" loext:char-shading-value="0" style:font-name-asian="Arial2" style:font-size-asian="10.5pt" style:font-name-complex="Arial2" style:font-size-complex="10.5pt"/>
    </style:style>
    <style:style style:name="T64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5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6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67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68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69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70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1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72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73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4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75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76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77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78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79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0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1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82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83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84" style:family="text">
      <style:text-properties fo:color="#18ffff" loext:opacity="100%" style:font-name="Arial1" fo:font-size="12pt" fo:font-weight="bold" fo:background-color="#01579b" loext:char-shading-value="0" style:font-size-asian="12pt" style:font-weight-asian="bold" style:font-name-complex="Arial2" style:font-size-complex="12pt" style:font-weight-complex="bold"/>
    </style:style>
    <style:style style:name="T85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86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87" style:family="text">
      <style:text-properties fo:color="#18ffff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88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9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0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91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2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93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9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95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6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97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98" style:family="text">
      <style:text-properties fo:color="#76ff03" loext:opacity="100%" fo:font-size="10.5pt" fo:font-weight="bold" fo:background-color="#1b5e20" loext:char-shading-value="0" style:font-name-asian="Arial2" style:font-size-asian="10.5pt" style:font-weight-asian="bold" style:font-name-complex="Arial2" style:font-size-complex="10.5pt" style:font-weight-complex="bold"/>
    </style:style>
    <style:style style:name="T99" style:family="text">
      <style:text-properties fo:color="#76ff03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76ff03" loext:opacity="100%" style:font-name="Arial1" fo:font-size="10.5pt" fo:font-weight="bold" fo:background-color="#1b5e20" loext:char-shading-value="0" style:font-size-asian="10.5pt" style:font-weight-asian="bold" style:font-name-complex="Arial2" style:font-size-complex="10.5pt" style:font-weight-complex="bold"/>
    </style:style>
    <style:style style:name="T101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2" style:family="text">
      <style:text-properties fo:color="#76ff03" loext:opacity="100%" style:font-name="Arial1" fo:font-size="11pt" fo:font-weight="bold" fo:background-color="#1b5e20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04" style:family="text">
      <style:text-properties fo:color="#76ff03" loext:opacity="100%" style:font-name="Arial1" fo:font-size="12pt" fo:font-weight="bold" fo:background-color="#006064" loext:char-shading-value="0" style:font-name-asian="Arial2" style:font-size-asian="12pt" style:font-weight-asian="bold" style:font-name-complex="Arial2" style:font-size-complex="12pt" style:font-weight-complex="bold"/>
    </style:style>
    <style:style style:name="T105" style:family="text">
      <style:text-properties fo:color="#76ff03" loext:opacity="100%" style:font-name="Arial1" fo:font-size="12pt" fo:font-weight="bold" fo:background-color="#1b5e20" loext:char-shading-value="0" style:font-size-asian="12pt" style:font-weight-asian="bold" style:font-name-complex="Arial2" style:font-size-complex="12pt" style:font-weight-complex="bold"/>
    </style:style>
    <style:style style:name="T106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7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08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09" style:family="text">
      <style:text-properties fo:color="#76ff03" loext:opacity="100%" style:font-name="Courier New" fo:font-size="9.5pt" fo:font-weight="bold" fo:background-color="#33691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10" style:family="text">
      <style:text-properties fo:color="#76ff03" loext:opacity="100%" style:font-name="Courier New" fo:font-size="9.5pt" fo:font-weight="bold" fo:background-color="#006064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11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12" style:family="text">
      <style:text-properties fo:color="#ff1744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13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14" style:family="text">
      <style:text-properties fo:color="#ff1744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15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16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17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18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19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20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121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22" style:family="text">
      <style:text-properties fo:color="#64ffda" loext:opacity="100%" style:font-name="Arial1" fo:font-size="12pt" fo:font-weight="bold" fo:background-color="#1a237e" loext:char-shading-value="0" style:font-size-asian="12pt" style:font-weight-asian="bold" style:font-name-complex="Arial2" style:font-size-complex="12pt" style:font-weight-complex="bold"/>
    </style:style>
    <style:style style:name="T123" style:family="text">
      <style:text-properties fo:color="#64ffda" loext:opacity="100%" style:font-name="Arial1" fo:font-size="12pt" fo:font-weight="bold" fo:background-color="#b71c1c" loext:char-shading-value="0" style:font-size-asian="12pt" style:font-weight-asian="bold" style:font-name-complex="Arial2" style:font-size-complex="12pt" style:font-weight-complex="bold"/>
    </style:style>
    <style:style style:name="T124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25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26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27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28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29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30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31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32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33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34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135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136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137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38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139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0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141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42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43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44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45" style:family="text">
      <style:text-properties fo:color="#ff4081" loext:opacity="100%" fo:font-size="10.5pt" fo:font-weight="bold" fo:background-color="#0d47a1" loext:char-shading-value="0" style:font-name-asian="Arial2" style:font-size-asian="10.5pt" style:font-weight-asian="bold" style:font-name-complex="Arial2" style:font-size-complex="10.5pt" style:font-weight-complex="bold"/>
    </style:style>
    <style:style style:name="T146" style:family="text">
      <style:text-properties fo:color="#ff4081" loext:opacity="100%" fo:font-size="10.5pt" fo:font-weight="bold" fo:background-color="#0d47a1" loext:char-shading-value="0" style:font-size-asian="10.5pt" style:font-weight-asian="bold" style:font-name-complex="Arial2" style:font-size-complex="10.5pt" style:font-weight-complex="bold"/>
    </style:style>
    <style:style style:name="T147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48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9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50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51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52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53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54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55" style:family="text">
      <style:text-properties fo:color="#c6ff00" loext:opacity="100%" style:font-name="Arial1" fo:font-size="12pt" fo:font-weight="bold" fo:background-color="#4a148c" loext:char-shading-value="0" style:font-size-asian="12pt" style:font-weight-asian="bold" style:font-name-complex="Arial2" style:font-size-complex="12pt" style:font-weight-complex="bold"/>
    </style:style>
    <style:style style:name="T156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57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158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9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160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61" style:family="text">
      <style:text-properties fo:color="#ffea00" loext:opacity="100%" fo:font-size="10.5pt" fo:font-weight="bold" fo:background-color="#e65100" loext:char-shading-value="0" style:font-name-asian="Arial2" style:font-size-asian="10.5pt" style:font-weight-asian="bold" style:font-name-complex="Arial2" style:font-size-complex="10.5pt" style:font-weight-complex="bold"/>
    </style:style>
    <style:style style:name="T162" style:family="text">
      <style:text-properties fo:color="#ffea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163" style:family="text">
      <style:text-properties fo:color="#ffea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64" style:family="text">
      <style:text-properties fo:color="#ffea00" loext:opacity="100%" fo:font-weight="bold" fo:background-color="#bf360c" loext:char-shading-value="0" style:font-weight-asian="bold" style:font-weight-complex="bold"/>
    </style:style>
    <style:style style:name="T165" style:family="text">
      <style:text-properties fo:color="#ffea00" loext:opacity="100%" fo:font-weight="bold" fo:background-color="#b71c1c" loext:char-shading-value="0" style:font-weight-asian="bold" style:font-weight-complex="bold"/>
    </style:style>
    <style:style style:name="T166" style:family="text">
      <style:text-properties fo:color="#ffea00" loext:opacity="100%" fo:font-weight="bold" fo:background-color="#1a237e" loext:char-shading-value="0" style:font-weight-asian="bold" style:font-weight-complex="bold"/>
    </style:style>
    <style:style style:name="T167" style:family="text">
      <style:text-properties fo:color="#ffea00" loext:opacity="100%" style:font-name="Arial1" fo:font-size="12pt" fo:font-weight="bold" fo:background-color="#1a237e" loext:char-shading-value="0" style:font-name-asian="Arial2" style:font-size-asian="12pt" style:font-weight-asian="bold" style:font-name-complex="Arial2" style:font-size-complex="12pt" style:font-weight-complex="bold"/>
    </style:style>
    <style:style style:name="T168" style:family="text">
      <style:text-properties fo:color="#ffea00" loext:opacity="100%" style:font-name="Arial1" fo:font-size="12pt" fo:font-weight="bold" fo:background-color="#1a237e" loext:char-shading-value="0" style:font-size-asian="12pt" style:font-weight-asian="bold" style:font-name-complex="Arial2" style:font-size-complex="12pt" style:font-weight-complex="bold"/>
    </style:style>
    <style:style style:name="T169" style:family="text">
      <style:text-properties fo:color="#ffea0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70" style:family="text">
      <style:text-properties fo:color="#ffea0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71" style:family="text">
      <style:text-properties fo:color="#ffea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72" style:family="text">
      <style:text-properties fo:color="#ffea00" loext:opacity="100%" style:font-name="Courier New" fo:font-size="9.5pt" fo:font-weight="bold" fo:background-color="#b71c1c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73" style:family="text">
      <style:text-properties fo:color="#ffea0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74" style:family="text">
      <style:text-properties fo:color="#e1bee7" loext:opacity="100%" style:font-name="Arial1" fo:font-size="10.5pt" fo:font-weight="bold" fo:background-color="#4a148c" loext:char-shading-value="0" style:font-size-asian="10.5pt" style:font-weight-asian="bold" style:font-name-complex="Arial2" style:font-size-complex="10.5pt" style:font-weight-complex="bold"/>
    </style:style>
    <style:style style:name="T175" style:family="text">
      <style:text-properties fo:color="#e1bee7" loext:opacity="100%" fo:font-size="10.5pt" fo:font-weight="bold" fo:background-color="#4a148c" loext:char-shading-value="0" style:font-name-asian="Arial2" style:font-size-asian="10.5pt" style:font-weight-asian="bold" style:font-name-complex="Arial2" style:font-size-complex="10.5pt" style:font-weight-complex="bold"/>
    </style:style>
    <style:style style:name="T176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77" style:family="text">
      <style:text-properties fo:color="#ff3d00" loext:opacity="100%" style:font-name="Arial1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78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79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80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81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82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183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84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185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6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87" style:family="text">
      <style:text-properties fo:color="#d1c4e9" loext:opacity="100%" fo:font-size="10.5pt" fo:font-weight="bold" fo:background-color="#311b92" loext:char-shading-value="0" style:font-name-asian="Arial2" style:font-size-asian="10.5pt" style:font-weight-asian="bold" style:font-name-complex="Arial2" style:font-size-complex="10.5pt" style:font-weight-complex="bold"/>
    </style:style>
    <style:style style:name="T188" style:family="text">
      <style:text-properties fo:color="#d1c4e9" loext:opacity="100%" style:font-name="Arial1" fo:font-size="10.5pt" fo:font-weight="bold" fo:background-color="#311b92" loext:char-shading-value="0" style:font-size-asian="10.5pt" style:font-weight-asian="bold" style:font-name-complex="Arial2" style:font-size-complex="10.5pt" style:font-weight-complex="bold"/>
    </style:style>
    <style:style style:name="T189" style:family="text">
      <style:text-properties fo:color="#d1c4e9" loext:opacity="100%" fo:font-weight="bold" fo:background-color="#311b92" loext:char-shading-value="0" style:font-weight-asian="bold" style:font-weight-complex="bold"/>
    </style:style>
    <style:style style:name="T190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191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92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93" style:family="text">
      <style:text-properties fo:color="#ffff00" loext:opacity="100%" style:font-name="Arial1" fo:font-size="12pt" fo:font-weight="bold" fo:background-color="#ff9100" loext:char-shading-value="0" style:font-name-asian="Arial2" style:font-size-asian="12pt" style:font-weight-asian="bold" style:font-name-complex="Arial2" style:font-size-complex="12pt" style:font-weight-complex="bold"/>
    </style:style>
    <style:style style:name="T194" style:family="text">
      <style:text-properties fo:color="#ffff00" loext:opacity="100%" style:font-name="Arial1" fo:font-size="12pt" fo:font-weight="bold" fo:background-color="#ff6e40" loext:char-shading-value="0" style:font-size-asian="12pt" style:font-weight-asian="bold" style:font-name-complex="Arial2" style:font-size-complex="12pt" style:font-weight-complex="bold"/>
    </style:style>
    <style:style style:name="T195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96" style:family="text">
      <style:text-properties fo:color="#ffff00" loext:opacity="100%" style:font-name="Arial1" fo:font-size="15pt" fo:font-weight="bold" fo:background-color="#ff6e40" loext:char-shading-value="0" style:font-size-asian="15pt" style:font-weight-asian="bold" style:font-name-complex="Arial2" style:font-size-complex="15pt" style:font-weight-complex="bold"/>
    </style:style>
    <style:style style:name="T197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98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199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200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201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202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03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204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5" style:family="text">
      <style:text-properties fo:font-weight="bold" fo:background-color="#ffd740" loext:char-shading-value="0" style:font-weight-asian="bold" style:font-weight-complex="bold"/>
    </style:style>
    <style:style style:name="T206" style:family="text">
      <style:text-properties fo:font-weight="bold" fo:background-color="#18ffff" loext:char-shading-value="0" style:font-weight-asian="bold" style:font-weight-complex="bold"/>
    </style:style>
    <style:style style:name="T207" style:family="text">
      <style:text-properties fo:font-weight="bold" fo:background-color="#ffff00" loext:char-shading-value="0" style:font-weight-asian="bold" style:font-weight-complex="bold"/>
    </style:style>
    <style:style style:name="T208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09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210" style:family="text">
      <style:text-properties fo:font-size="10.5pt" fo:font-weight="bold" style:font-size-asian="10.5pt" style:font-weight-asian="bold" style:font-name-complex="Arial2" style:font-size-complex="10.5pt" style:font-weight-complex="bold"/>
    </style:style>
    <style:style style:name="T211" style:family="text">
      <style:text-properties fo:font-size="10.5pt" style:font-name-asian="Arial2" style:font-size-asian="10.5pt" style:font-name-complex="Arial2" style:font-size-complex="10.5pt"/>
    </style:style>
    <style:style style:name="T212" style:family="text">
      <style:text-properties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13" style:family="text">
      <style:text-properties style:font-name="Arial1" fo:font-size="12pt" style:font-size-asian="12pt" style:font-name-complex="Arial2" style:font-size-complex="12pt"/>
    </style:style>
    <style:style style:name="T214" style:family="text">
      <style:text-properties style:font-name="Arial1" fo:font-size="12pt" style:font-name-asian="Arial2" style:font-size-asian="12pt" style:font-name-complex="Arial2" style:font-size-complex="12pt"/>
    </style:style>
    <style:style style:name="T215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16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217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218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219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20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221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222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223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224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225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226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227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28" style:family="text">
      <style:text-properties fo:color="#1a1a1a" loext:opacity="100%" style:font-name="Arial1" fo:font-size="12pt" fo:font-weight="bold" fo:background-color="#ff6e40" loext:char-shading-value="0" style:font-size-asian="12pt" style:font-weight-asian="bold" style:font-name-complex="Arial2" style:font-size-complex="12pt" style:font-weight-complex="bold"/>
    </style:style>
    <style:style style:name="T229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30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231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232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233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234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235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6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7" style:family="text">
      <style:text-properties fo:color="#2b2b2b" loext:opacity="100%" style:font-name="Courier New" fo:font-size="9.5pt" fo:font-weight="bold" fo:background-color="#ffd74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8" style:family="text">
      <style:text-properties fo:color="#2b2b2b" loext:opacity="100%" style:font-name="Courier New" fo:font-size="9.5pt" fo:font-weight="bold" fo:background-color="#76ff03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39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40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41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42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243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244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245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246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247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248" style:family="text">
      <style:text-properties fo:color="#404040" loext:opacity="100%" fo:font-size="11pt" fo:background-color="#ffff00" loext:char-shading-value="0" style:font-name-asian="Arial2" style:font-size-asian="11pt" style:font-name-complex="Arial2" style:font-size-complex="11pt"/>
    </style:style>
    <style:style style:name="T249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250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251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252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253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54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255" style:family="text">
      <style:text-properties fo:color="#eeeeee" loext:opacity="100%" style:font-name="Courier New" fo:font-size="9.5pt" fo:font-weight="bold" fo:background-color="#b71c1c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56" style:family="text">
      <style:text-properties fo:color="#eeeeee" loext:opacity="100%" style:font-name="Arial1" fo:font-size="12pt" fo:font-weight="bold" fo:background-color="#b71c1c" loext:char-shading-value="0" style:font-size-asian="12pt" style:font-weight-asian="bold" style:font-name-complex="Arial2" style:font-size-complex="12pt" style:font-weight-complex="bold"/>
    </style:style>
    <style:style style:name="T257" style:family="text">
      <style:text-properties fo:color="#fafafa" loext:opacity="100%" style:font-name="Courier New" fo:font-size="9.5pt" fo:font-weight="bold" fo:background-color="#ff4081" loext:char-shading-value="0" style:font-name-asian="Courier New1" style:font-size-asian="9.5pt" style:font-weight-asian="bold" style:font-name-complex="Courier New1" style:font-size-complex="9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 loext:marker-style-name="T1"><text:span text:style-name="T2">【</text:span><text:span text:style-name="T9">11</text:span><text:span text:style-name="T2">】堆積（</text:span><text:span text:style-name="T9">Heap</text:span><text:span text:style-name="T2">）＋優先佇列（</text:span><text:span text:style-name="T9">Priority Queue</text:span><text:span text:style-name="T2">）</text:span></text:p>
      <text:p text:style-name="P32" loext:marker-style-name="T15"><text:span text:style-name="T16">資訊類公職考試完整筆記 ● 考點：</text:span><text:span text:style-name="T25">110</text:span><text:span text:style-name="T16">地</text:span><text:span text:style-name="T25">Q4</text:span><text:span text:style-name="T16">、</text:span><text:span text:style-name="T25">111</text:span><text:span text:style-name="T16">地</text:span><text:span text:style-name="T25">Q4</text:span><text:span text:style-name="T16">、</text:span><text:span text:style-name="T25">113</text:span><text:span text:style-name="T16">地</text:span><text:span text:style-name="T25">Q3</text:span><text:span text:style-name="T16">、</text:span><text:span text:style-name="T25">114</text:span><text:span text:style-name="T16">地</text:span><text:span text:style-name="T25">Q2</text:span></text:p>
      <text:p text:style-name="P1"/>
      <text:h text:style-name="P19" text:outline-level="1" loext:marker-style-name="T3"><text:span text:style-name="T4">一、</text:span><text:span text:style-name="T10">Heap </text:span><text:span text:style-name="T4">的定義與兩大條件</text:span></text:h>
      <text:p text:style-name="P34" loext:marker-style-name="T28"><text:span text:style-name="T44">Heap</text:span><text:span text:style-name="T29">（堆積）是一種特殊的二元樹，必須同時滿足以下兩個條件，缺一不可：</text:span></text:p>
      <text:p text:style-name="P1"/>
      <text:h text:style-name="P17" text:outline-level="2" loext:marker-style-name="T17"><text:span text:style-name="T18">條件</text:span><text:span text:style-name="T26">1</text:span><text:span text:style-name="T18">：</text:span><text:span text:style-name="T26">Complete Binary Tree</text:span><text:span text:style-name="T18">（完全二元樹）</text:span></text:h>
      <text:list xml:id="list3120945441" text:style-name="WWNum5">
        <text:list-item text:start-value="1">
          <text:p text:style-name="P21" loext:marker-style-name="T34"><text:span text:style-name="T64">每一層節點都必須盡量填滿</text:span><text:span text:style-name="T35">。</text:span></text:p>
        </text:list-item>
        <text:list-item text:style-override="WWNum6">
          <text:p text:style-name="P22" loext:marker-style-name="T34"><text:span text:style-name="T36">最後一層</text:span><text:span text:style-name="T35">的節點必須</text:span><text:span text:style-name="T75">從左往右依序填入</text:span><text:span text:style-name="T35">，</text:span><text:span text:style-name="T78">不可跳過</text:span><text:span text:style-name="T35">。</text:span></text:p>
        </text:list-item>
      </text:list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 loext:marker-style-name="T42"><text:span text:style-name="T49">✅ </text:span><text:span text:style-name="T43">合法 </text:span><text:span text:style-name="T49">Complete Binary Tree</text:span><text:span text:style-name="T43">：</text:span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7"/>10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8"/>/ <text:s text:c="2"/>\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4"/>90 <text:s text:c="4"/>8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4"/>/ \ <text:s text:c="5"/>/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37"><text:span text:style-name="T50">70 <text:s/>60 50</text:span><text:span text:style-name="T37"/></text:p>
          </table:table-cell>
        </table:table-row>
        <table:table-row table:style-name="表格1.1">
          <table:table-cell table:style-name="表格1.A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❌ </text:span><text:span text:style-name="T43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7"/>10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8"/>/ <text:s text:c="2"/>\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4"/>90 <text:s text:c="4"/>80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8"/>\ <text:s text:c="2"/>/</text:span><text:span text:style-name="T42"/></text:p>
          </table:table-cell>
        </table:table-row>
        <table:table-row table:style-name="表格1.1">
          <table:table-cell table:style-name="表格1.A1" office:value-type="string">
            <text:p text:style-name="P3" loext:marker-style-name="T42"><text:span text:style-name="T49"><text:s text:c="6"/></text:span><text:span text:style-name="T50">60 50</text:span></text:p>
          </table:table-cell>
        </table:table-row>
      </table:table>
      <text:p text:style-name="P1"/>
      <text:h text:style-name="P17" text:outline-level="2" loext:marker-style-name="T17"><text:span text:style-name="T18">條件</text:span><text:span text:style-name="T26">2</text:span><text:span text:style-name="T18">：</text:span><text:span text:style-name="T26">Heap Property</text:span><text:span text:style-name="T18">（堆積性質）</text:span></text:h>
      <text:p text:style-name="P34" loext:marker-style-name="T28"><text:span text:style-name="T29">父節點與子節點之間必須滿足固定的大小關係，分為兩種：</text:span><text:span text:style-name="T28"/>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33" loext:marker-style-name="T5"><text:span text:style-name="T6">類型</text:span><text:span text:style-name="T5"/></text:p>
            </table:table-cell>
            <table:table-cell table:style-name="表格2.A1" office:value-type="string">
              <text:p text:style-name="P33" loext:marker-style-name="T5"><text:span text:style-name="T6">規則</text:span><text:span text:style-name="T5"/></text:p>
            </table:table-cell>
            <table:table-cell table:style-name="表格2.A1" office:value-type="string">
              <text:p text:style-name="P33" loext:marker-style-name="T5"><text:span text:style-name="T6">範例</text:span><text:span text:style-name="T5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33" loext:marker-style-name="T42"><text:span text:style-name="T95">Min</text:span><text:span text:style-name="T49"> Heap</text:span></text:p>
          </table:table-cell>
          <table:table-cell table:style-name="表格2.A2" office:value-type="string">
            <text:p text:style-name="P33" loext:marker-style-name="T42"><text:span text:style-name="T49">parent ≤ child</text:span><text:span text:style-name="T43">（</text:span><text:span text:style-name="T38">父小子大</text:span><text:span text:style-name="T43">）</text:span></text:p>
          </table:table-cell>
          <table:table-cell table:style-name="表格2.A2" office:value-type="string">
            <text:p text:style-name="P33" loext:marker-style-name="T42"><text:span text:style-name="T49">Root </text:span><text:span text:style-name="T43">必為最小值</text:span></text:p>
          </table:table-cell>
        </table:table-row>
        <table:table-row table:style-name="表格2.1">
          <table:table-cell table:style-name="表格2.A3" office:value-type="string">
            <text:p text:style-name="P33" loext:marker-style-name="T42"><text:span text:style-name="T111">Max</text:span><text:span text:style-name="T49"> Heap</text:span></text:p>
          </table:table-cell>
          <table:table-cell table:style-name="表格2.A3" office:value-type="string">
            <text:p text:style-name="P33" loext:marker-style-name="T42"><text:span text:style-name="T49">parent ≥ child</text:span><text:span text:style-name="T43">（</text:span><text:span text:style-name="T39">父大子小</text:span><text:span text:style-name="T43">）</text:span></text:p>
          </table:table-cell>
          <table:table-cell table:style-name="表格2.A3" office:value-type="string">
            <text:p text:style-name="P33" loext:marker-style-name="T42"><text:span text:style-name="T49">Root </text:span><text:span text:style-name="T43">必為最大值</text:span></text:p>
          </table:table-cell>
        </table:table-row>
      </table:table>
      <text:p text:style-name="P1"><text:soft-page-break/></text:p>
      <text:p text:style-name="P1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3" loext:marker-style-name="T42"><text:span text:style-name="T49">📌 </text:span><text:span text:style-name="T43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3" loext:marker-style-name="T42"><text:span text:style-name="T50">Heap</text:span><text:span text:style-name="T49"> = </text:span><text:span text:style-name="T120">Complete Binary Tree + Heap Property</text:span></text:p>
          </table:table-cell>
        </table:table-row>
      </table:table>
      <text:p text:style-name="P1"/>
      <text:p text:style-name="P1"/>
      <text:h text:style-name="P19" text:outline-level="1" loext:marker-style-name="T3"><text:span text:style-name="T4">二、</text:span><text:span text:style-name="T10">Heap </text:span><text:span text:style-name="T4">的陣列表示法（</text:span><text:span text:style-name="T10">Implicit Array</text:span><text:span text:style-name="T4">）</text:span></text:h>
      <text:p text:style-name="P34" loext:marker-style-name="T28"><text:span text:style-name="T29">由於 </text:span><text:span text:style-name="T124">Heap </text:span><text:span text:style-name="T126">是 </text:span><text:span text:style-name="T124">Complete Binary Tree</text:span><text:span text:style-name="T29">，</text:span><text:span text:style-name="T140">節點位置完全可預測</text:span><text:span text:style-name="T29">，因此不需要指標（</text:span><text:span text:style-name="T44">pointer</text:span><text:span text:style-name="T29">），直接用陣列儲存即可，這稱為 </text:span><text:span text:style-name="T44">Implicit Array</text:span><text:span text:style-name="T29">（隱式陣列）。</text:span></text:p>
      <text:p text:style-name="P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" loext:marker-style-name="T42"><text:span text:style-name="T43">【索引公式 — 考試必背】</text:span><text:span text:style-name="T42"/></text:p>
          </table:table-cell>
        </table:table-row>
        <table:table-row table:style-name="表格4.1">
          <table:table-cell table:style-name="表格4.A1" office:value-type="string">
            <text:p text:style-name="P3" loext:marker-style-name="T42"><text:span text:style-name="T49"><text:s text:c="2"/>Root <text:s text:c="5"/>→ A[1]</text:span><text:span text:style-name="T42"/></text:p>
          </table:table-cell>
        </table:table-row>
        <table:table-row table:style-name="表格4.1">
          <table:table-cell table:style-name="表格4.A1" office:value-type="string">
            <text:p text:style-name="P3" loext:marker-style-name="T42"><text:span text:style-name="T49"><text:s text:c="2"/></text:span><text:span text:style-name="T149">Parent</text:span><text:span text:style-name="T49"> <text:s text:c="3"/>→ A[</text:span><text:span text:style-name="T85">i / 2</text:span><text:span text:style-name="T49">] <text:s text:c="5"/></text:span><text:span text:style-name="T43">（整數除法）</text:span></text:p>
          </table:table-cell>
        </table:table-row>
        <table:table-row table:style-name="表格4.1">
          <table:table-cell table:style-name="表格4.A1" office:value-type="string">
            <text:p text:style-name="P3" loext:marker-style-name="T42"><text:span text:style-name="T49"><text:s text:c="2"/></text:span><text:span text:style-name="T133">Left child</text:span><text:span text:style-name="T49"> → A[</text:span><text:span text:style-name="T96">2i</text:span><text:span text:style-name="T49">] <text:s text:c="6"/></text:span><text:span text:style-name="T43">（</text:span><text:span text:style-name="T159">多生貴子</text:span><text:span text:style-name="T43">）</text:span></text:p>
          </table:table-cell>
        </table:table-row>
        <table:table-row table:style-name="表格4.1">
          <table:table-cell table:style-name="表格4.A1" office:value-type="string">
            <text:p text:style-name="P3" loext:marker-style-name="T42"><text:span text:style-name="T49"><text:s text:c="2"/></text:span><text:span text:style-name="T133">Right child</text:span><text:span text:style-name="T49"> → A[</text:span><text:span text:style-name="T96">2i + 1</text:span><text:span text:style-name="T49">]</text:span></text:p>
          </table:table-cell>
        </table:table-row>
      </table:table>
      <text:p text:style-name="P1"/>
      <text:h text:style-name="P17" text:outline-level="2" loext:marker-style-name="T17"><text:span text:style-name="T18">範例</text:span><text:span text:style-name="T17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3" loext:marker-style-name="T42"><text:span text:style-name="T43">樹狀結構：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8"/>10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7"/>/ <text:s text:c="2"/>\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5"/>90 <text:s text:c="4"/>8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5"/>/ \ <text:s text:c="4"/>/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/>70 <text:s/>60 5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/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3">陣列儲存：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2"/>Index: <text:s/>1 <text:s text:c="3"/>2 <text:s text:c="3"/>3 <text:s text:c="3"/>4 <text:s text:c="3"/>5 <text:s text:c="3"/>6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2"/>Value: 100 <text:s text:c="2"/>90 <text:s text:c="2"/>80 <text:s text:c="2"/>70 <text:s text:c="2"/>60 <text:s text:c="2"/>50</text:span><text:span text:style-name="T42"/></text:p>
          </table:table-cell>
        </table:table-row>
        <table:table-row table:style-name="表格5.1">
          <table:table-cell table:style-name="表格5.A1" office:value-type="string">
            <text:p text:style-name="P3"/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3">驗證：</text:span><text:span text:style-name="T49">A[5] = 60</text:span><text:span text:style-name="T43">，</text:span><text:span text:style-name="T98">Parent = A[5/2] = A[2] </text:span><text:span text:style-name="T49">= 90 ✅</text:span></text:p>
          </table:table-cell>
        </table:table-row>
        <table:table-row table:style-name="表格5.1">
          <table:table-cell table:style-name="表格5.A1" office:value-type="string">
            <text:p text:style-name="P3" loext:marker-style-name="T42"><text:span text:style-name="T49"><text:s text:c="6"/></text:span><text:span text:style-name="T87">Left child = A[10]</text:span><text:span text:style-name="T43">，</text:span><text:span text:style-name="T161">Right child = A[11]</text:span><text:span text:style-name="T43">（皆為空）</text:span></text:p>
          </table:table-cell>
        </table:table-row>
      </table:table>
      <text:p text:style-name="P1"/>
      <text:p text:style-name="P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3" loext:marker-style-name="T42"><text:span text:style-name="T49">⚠️ <text:s/></text:span><text:span text:style-name="T43">考試陷阱：</text:span><text:span text:style-name="T79">陣列索引從 </text:span><text:span text:style-name="T85">1 </text:span><text:span text:style-name="T79">開始</text:span><text:span text:style-name="T43">，</text:span><text:span text:style-name="T36">不是 </text:span><text:span text:style-name="T50">0</text:span><text:span text:style-name="T43">。</text:span></text:p>
          </table:table-cell>
        </table:table-row>
        <table:table-row table:style-name="表格6.1">
          <table:table-cell table:style-name="表格6.A1" office:value-type="string">
            <text:p text:style-name="P3" loext:marker-style-name="T42"><text:span text:style-name="T49"><text:s text:c="5"/></text:span><text:span text:style-name="T43">若從 </text:span><text:span text:style-name="T49">0 </text:span><text:span text:style-name="T43">開始則公式不同：</text:span><text:span text:style-name="T49">parent=(i-1)/2, left=2i+1, right=2i+2</text:span><text:span text:style-name="T43">。</text:span></text:p>
          </table:table-cell>
        </table:table-row>
        <table:table-row table:style-name="表格6.1">
          <table:table-cell table:style-name="表格6.A1" office:value-type="string">
            <text:p text:style-name="P3" loext:marker-style-name="T42"><text:span text:style-name="T49"><text:s text:c="5"/></text:span><text:span text:style-name="T43">考題若未特別說明，</text:span><text:span text:style-name="T174">預設從 </text:span><text:span text:style-name="T175">1 </text:span><text:span text:style-name="T174">開始</text:span><text:span text:style-name="T43">。</text:span></text:p>
          </table:table-cell>
        </table:table-row>
      </table:table>
      <text:p text:style-name="P1"/>
      <text:p text:style-name="P1"/>
      <text:h text:style-name="P19" text:outline-level="1" loext:marker-style-name="T3"><text:span text:style-name="T4">三、</text:span><text:span text:style-name="T10">Heap </text:span><text:span text:style-name="T4">的核心操作與時間複雜度</text:span></text:h>
      <text:h text:style-name="P17" text:outline-level="2" loext:marker-style-name="T17"><text:span text:style-name="T26">3-1 </text:span><text:span text:style-name="T18">插入（</text:span><text:span text:style-name="T26">Insert</text:span><text:span text:style-name="T18">）— </text:span><text:span text:style-name="T26">Bubble Up</text:span><text:span text:style-name="T18">（向上浮）</text:span></text:h>
      <text:p text:style-name="P34" loext:marker-style-name="T28"><text:span text:style-name="T29">步驟：</text:span><text:span text:style-name="T28"/></text:p>
      <text:list xml:id="list170047557281414" text:continue-list="list3120945441" text:style-name="WWNum7">
        <text:list-item>
          <text:p text:style-name="P23" loext:marker-style-name="T34"><text:span text:style-name="T59">Step 1</text:span><text:span text:style-name="T35">：</text:span><text:span text:style-name="T176">將新元素放到陣列最後一個位置</text:span><text:span text:style-name="T35">（</text:span><text:span text:style-name="T59">Complete Binary Tree </text:span><text:span text:style-name="T35">的下一個</text:span><text:span text:style-name="T36">空位</text:span><text:span text:style-name="T35">）。</text:span></text:p>
        </text:list-item>
        <text:list-item text:style-override="WWNum8">
          <text:p text:style-name="P24" loext:marker-style-name="T34"><text:span text:style-name="T59">Step 2</text:span><text:span text:style-name="T35">：</text:span><text:span text:style-name="T152">與父節點比較</text:span><text:span text:style-name="T35">，若違反 </text:span><text:span text:style-name="T59">Heap Property</text:span><text:span text:style-name="T35">，則交換。</text:span></text:p>
        </text:list-item>
        <text:list-item text:style-override="WWNum9">
          <text:p text:style-name="P25" loext:marker-style-name="T34"><text:span text:style-name="T59">Step 3</text:span><text:span text:style-name="T35">：重複 </text:span><text:span text:style-name="T59">Step 2</text:span><text:span text:style-name="T35">，一路往上，直到滿足 </text:span><text:span text:style-name="T59">Heap Property </text:span><text:span text:style-name="T35">或抵達 </text:span><text:span text:style-name="T59">Root </text:span><text:span text:style-name="T35">為止。</text:span></text:p>
        </text:list-item>
      </text:list>
      <text:p text:style-name="P1"/>
      <text:p text:style-name="P36" loext:marker-style-name="T7"><text:span text:style-name="T8">完整範例：</text:span><text:span text:style-name="T12">Max Heap </text:span><text:span text:style-name="T8">插入 </text:span><text:span text:style-name="T12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3" loext:marker-style-name="T42"><text:span text:style-name="T43">原始 </text:span><text:span text:style-name="T49">Max Heap</text:span><text:span text:style-name="T43">：</text:span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8"/>10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7"/>/ <text:s text:c="2"/>\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6"/>90 <text:s text:c="3"/>8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5"/>/ <text:s/>\ <text:s text:c="3"/>/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70 <text:s/>60 5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3">陣列：</text:span><text:span text:style-name="T49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Step 1</text:span><text:span text:style-name="T43">：</text:span><text:span text:style-name="T36">插入 </text:span><text:span text:style-name="T50">95</text:span><text:span text:style-name="T49"> → </text:span><text:span text:style-name="T38">放到 </text:span><text:span text:style-name="T52">index 7</text:span><text:span text:style-name="T38">（最後）</text:span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3">陣列：</text:span><text:span text:style-name="T49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Step 2</text:span><text:span text:style-name="T43">：</text:span><text:span text:style-name="T187">95 </text:span><text:span text:style-name="T188">的 </text:span><text:span text:style-name="T187">parent = A[7/2] = A[3]</text:span><text:span text:style-name="T49"> = 80</text:span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8"/></text:span><text:span text:style-name="T50">95 &gt; 80</text:span><text:span text:style-name="T49"> → </text:span><text:span text:style-name="T43">違反 </text:span><text:span text:style-name="T49">Max Heap → </text:span><text:span text:style-name="T40">交換</text:span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3">陣列：</text:span><text:span text:style-name="T49">[100, 90, </text:span><text:span text:style-name="T54">95</text:span><text:span text:style-name="T49">, 70, 60, 50, </text:span><text:span text:style-name="T54">80</text:span><text:span text:style-name="T49">]</text:span>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Step 3</text:span><text:span text:style-name="T43">：</text:span><text:span text:style-name="T187">95 </text:span><text:span text:style-name="T188">的 </text:span><text:span text:style-name="T187">parent = A[3/2] = A[1]</text:span><text:span text:style-name="T49"> = 100</text:span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7"/></text:span><text:span text:style-name="T50"><text:s/>95 &lt; 100</text:span><text:span text:style-name="T49"> → </text:span><text:span text:style-name="T43">符合 </text:span><text:span text:style-name="T49">Max Heap → </text:span><text:span text:style-name="T40">停止</text:span>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ext:soft-page-break/>
        <table:table-row table:style-name="表格7.1">
          <table:table-cell table:style-name="表格7.A1" office:value-type="string">
            <text:p text:style-name="P3" loext:marker-style-name="T42"><text:span text:style-name="T43">最終結果：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8"/>100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7"/>/ <text:s text:c="2"/>\</text:span><text:span text:style-name="T42"/></text:p>
          </table:table-cell>
        </table:table-row>
        <table:table-row table:style-name="表格7.1">
          <table:table-cell table:style-name="表格7.A1" office:value-type="string">
            <text:p text:style-name="P3" loext:marker-style-name="T42"><text:span text:style-name="T49"><text:s text:c="5"/>90 <text:s text:c="3"/>95</text:span></text:p>
          </table:table-cell>
        </table:table-row>
        <table:table-row table:style-name="表格7.1">
          <table:table-cell table:style-name="表格7.A1" office:value-type="string">
            <text:p text:style-name="P37" loext:marker-style-name="T42"><text:span text:style-name="T49"><text:s text:c="5"/>/ <text:s/>\ <text:s text:c="2"/>/</text:span><text:span text:style-name="T42"> <text:s text:c="2"/>\</text:span></text:p>
          </table:table-cell>
        </table:table-row>
        <table:table-row table:style-name="表格7.1">
          <table:table-cell table:style-name="表格7.A1" office:value-type="string">
            <text:p text:style-name="P38" loext:marker-style-name="T42"><text:s/><text:span text:style-name="T49">70 <text:s/>60 50 <text:s/>80</text:span></text:p>
          </table:table-cell>
        </table:table-row>
      </table:table>
      <text:p text:style-name="P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3" loext:marker-style-name="T42"><text:span text:style-name="T43">時間複雜度：</text:span><text:span text:style-name="T49">O(log n) <text:s/>← </text:span><text:span text:style-name="T43">最多往上走樹高（</text:span><text:span text:style-name="T49">h = log₂n</text:span><text:span text:style-name="T43">）步</text:span></text:p>
          </table:table-cell>
        </table:table-row>
      </table:table>
      <text:p text:style-name="P1"/>
      <text:p text:style-name="P1"/>
      <text:h text:style-name="P17" text:outline-level="2" loext:marker-style-name="T17"><text:span text:style-name="T26">3-2 </text:span><text:span text:style-name="T80">刪除最大值</text:span><text:span text:style-name="T18">（</text:span><text:span text:style-name="T26">Delete / Extract-Max</text:span><text:span text:style-name="T18">）— </text:span><text:span text:style-name="T26">Heapify</text:span><text:span text:style-name="T18">（向下沉）</text:span></text:h>
      <text:p text:style-name="P34" loext:marker-style-name="T28"><text:span text:style-name="T29">步驟：</text:span><text:span text:style-name="T28"/></text:p>
      <text:list xml:id="list170047388437149" text:continue-list="list170047557281414" text:style-name="WWNum10">
        <text:list-item>
          <text:p text:style-name="P26" loext:marker-style-name="T34"><text:span text:style-name="T59">Step 1</text:span><text:span text:style-name="T35">：</text:span><text:span text:style-name="T176">取出 </text:span><text:span text:style-name="T181">Root</text:span><text:span text:style-name="T176">（最大值）</text:span><text:span text:style-name="T35">。</text:span></text:p>
        </text:list-item>
        <text:list-item text:style-override="WWNum11">
          <text:p text:style-name="P27" loext:marker-style-name="T34"><text:span text:style-name="T59">Step 2</text:span><text:span text:style-name="T35">：</text:span><text:span text:style-name="T128">將陣列最後一個元素移到 </text:span><text:span text:style-name="T133">Root </text:span><text:span text:style-name="T128">位置。</text:span></text:p>
        </text:list-item>
        <text:list-item text:style-override="WWNum12">
          <text:p text:style-name="P28" loext:marker-style-name="T34"><text:span text:style-name="T59">Step 3</text:span><text:span text:style-name="T35">：</text:span><text:span text:style-name="T152">與兩個子節點中</text:span><text:span text:style-name="T190">較大的</text:span><text:span text:style-name="T152">比較</text:span><text:span text:style-name="T35">，若違反 </text:span><text:span text:style-name="T59">Heap Property</text:span><text:span text:style-name="T35">，則交換。</text:span></text:p>
        </text:list-item>
        <text:list-item text:style-override="WWNum13">
          <text:p text:style-name="P29" loext:marker-style-name="T34"><text:span text:style-name="T59">Step 4</text:span><text:span text:style-name="T35">：重複 </text:span><text:span text:style-name="T59">Step 3</text:span><text:span text:style-name="T35">（</text:span><text:span text:style-name="T59">Heapify / Bubble Down</text:span><text:span text:style-name="T35">），一路往下，直到滿足條件或抵達葉節點。</text:span></text:p>
        </text:list-item>
      </text:list>
      <text:p text:style-name="P1"/>
      <text:p text:style-name="P36" loext:marker-style-name="T7"><text:span text:style-name="T8">完整範例：</text:span><text:span text:style-name="T12">Max Heap </text:span><text:span text:style-name="T8">刪除 </text:span><text:span text:style-name="T12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" loext:marker-style-name="T42"><text:span text:style-name="T43">原始 </text:span><text:span text:style-name="T49">Max Heap</text:span><text:span text:style-name="T43">：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9"/>10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/ <text:s text:c="2"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7"/>90 <text:s text:c="3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6"/>/ \ <text:s text:c="2"/>/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/>70 <text:s/>60 <text:s/>5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Step 1</text:span><text:span text:style-name="T43">：取出 </text:span><text:span text:style-name="T49">Root = 100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Step 2</text:span><text:span text:style-name="T43">：</text:span><text:span text:style-name="T79">把最後元素 </text:span><text:span text:style-name="T85">50 </text:span><text:span text:style-name="T79">移到 </text:span><text:span text:style-name="T85">Root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9"/>5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7"/>90 <text:s text:c="2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6"/>/ 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4"/>70 <text:s/>60</text:span><text:span text:style-name="T42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Step 3</text:span><text:span text:style-name="T43">：</text:span><text:span text:style-name="T98">50 </text:span><text:span text:style-name="T100">的子節點 </text:span><text:span text:style-name="T98">90</text:span><text:span text:style-name="T100">、</text:span><text:span text:style-name="T98">80</text:span><text:span text:style-name="T100">，較大為 </text:span><text:span text:style-name="T98">90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50 &lt; 90 → </text:span><text:span text:style-name="T43">交換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9"/>9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7"/>50 <text:s text:c="2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6"/>/ 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4"/>70 <text:s/>6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Step 4</text:span><text:span text:style-name="T43">：</text:span><text:span text:style-name="T98">50 </text:span><text:span text:style-name="T100">的子節點 </text:span><text:span text:style-name="T98">70</text:span><text:span text:style-name="T100">、</text:span><text:span text:style-name="T98">60</text:span><text:span text:style-name="T100">，較大為 </text:span><text:span text:style-name="T98">70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50 &lt; 70 → </text:span><text:span text:style-name="T43">交換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9"/>9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7"/>70 <text:s text:c="2"/>8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6"/>/ \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<text:s text:c="3"/>50 <text:s/>60</text:span><text:span text:style-name="T42"/>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9">Step 5</text:span><text:span text:style-name="T43">：</text:span><text:span text:style-name="T49">50 </text:span><text:span text:style-name="T43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3" loext:marker-style-name="T42"><text:span text:style-name="T43">最終陣列：</text:span><text:span text:style-name="T49">[90, 70, 80, 50, 60]</text:span></text:p>
          </table:table-cell>
        </table:table-row>
      </table:table>
      <text:p text:style-name="P1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" loext:marker-style-name="T42"><text:span text:style-name="T41">時間複雜度：</text:span><text:span text:style-name="T54">O(log n) </text:span><text:span text:style-name="T49"><text:s/>← </text:span><text:span text:style-name="T43">最多往下走樹高（</text:span><text:span text:style-name="T49">h = log₂n</text:span><text:span text:style-name="T43">）步</text:span></text:p>
          </table:table-cell>
        </table:table-row>
      </table:table>
      <text:p text:style-name="P1"/>
      <text:p text:style-name="P1"/>
      <text:h text:style-name="P19" text:outline-level="1" loext:marker-style-name="T3"><text:span text:style-name="T4">四、建立 </text:span><text:span text:style-name="T11">Heap</text:span><text:span text:style-name="T4">（</text:span><text:span text:style-name="T10">Build Heap</text:span><text:span text:style-name="T4">）</text:span></text:h>
      <text:h text:style-name="P17" text:outline-level="2" loext:marker-style-name="T17"><text:span text:style-name="T18">方法 </text:span><text:span text:style-name="T27">A</text:span><text:span text:style-name="T18">：逐個插入法</text:span></text:h>
      <text:p text:style-name="P34" loext:marker-style-name="T30"><text:span text:style-name="T31">從</text:span><text:span text:style-name="T81">空</text:span><text:span text:style-name="T31"> </text:span><text:span text:style-name="T45">Heap</text:span><text:span text:style-name="T48"> </text:span><text:span text:style-name="T31">開始，呼叫 </text:span><text:span text:style-name="T106">n </text:span><text:span text:style-name="T101">次 </text:span><text:span text:style-name="T106">Insert</text:span><text:span text:style-name="T31">，每次 </text:span><text:span text:style-name="T184">O(log n)</text:span><text:span text:style-name="T31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" loext:marker-style-name="T42"><text:span text:style-name="T60">總時間：</text:span><text:span text:style-name="T150">n × O(log n)</text:span><text:span text:style-name="T49"> = O(n log n)</text:span></text:p>
          </table:table-cell>
        </table:table-row>
      </table:table>
      <text:p text:style-name="P1"/>
      <text:h text:style-name="P17" text:outline-level="2" loext:marker-style-name="T17"><text:span text:style-name="T18">方法 </text:span><text:span text:style-name="T27">B</text:span><text:span text:style-name="T18">：</text:span><text:span text:style-name="T26">Bottom-Up Build Heap</text:span><text:span text:style-name="T18">（</text:span><text:span text:style-name="T26">Floyd</text:span><text:span text:style-name="T27"> </text:span><text:span text:style-name="T18">演算法）★考試重點★</text:span></text:h>
      <text:p text:style-name="P34" loext:marker-style-name="T30"><text:span text:style-name="T31">直接</text:span><text:span text:style-name="T191">將 </text:span><text:span text:style-name="T197">n </text:span><text:span text:style-name="T191">個元素放入陣列</text:span><text:span text:style-name="T31">，從</text:span><text:span text:style-name="T81">最後一個非葉節點（</text:span><text:span text:style-name="T90">index = ⌊n/2⌋</text:span><text:span text:style-name="T81">）開始</text:span><text:span text:style-name="T31">，</text:span><text:span text:style-name="T153">由下往上</text:span><text:span text:style-name="T31">逐一執行 </text:span><text:span text:style-name="T48">Heapify</text:span><text:span text:style-name="T31">。</text:span></text:p>
      <text:p text:style-name="P1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39" loext:marker-style-name="T199"><text:span text:style-name="T199">★ </text:span><text:span text:style-name="T200">為何從 <text:s text:c="2"/>?</text:span><text:span text:style-name="T199"> <text:s/>⌊n/2⌋ </text:span><text:span text:style-name="T200">開始？</text:span></text:p>
          </table:table-cell>
        </table:table-row>
        <table:table-row table:style-name="表格12.1">
          <table:table-cell table:style-name="表格12.A1" office:value-type="string">
            <text:p text:style-name="P3" loext:marker-style-name="T42"><text:span text:style-name="T85">index &gt; ⌊n/2⌋ </text:span><text:span text:style-name="T86">的節點全部都是葉節點</text:span><text:span text:style-name="T60">（</text:span><text:span text:style-name="T68">無子節點</text:span><text:span text:style-name="T60">），</text:span></text:p>
          </table:table-cell>
        </table:table-row>
        <table:table-row table:style-name="表格12.1">
          <table:table-cell table:style-name="表格12.A1" office:value-type="string">
            <text:p text:style-name="P3" loext:marker-style-name="T42"><text:span text:style-name="T60">葉節點本身已滿足 </text:span><text:span text:style-name="T49">Heap Property(</text:span><text:span text:style-name="T150">Heap Property</text:span><text:span text:style-name="T151">就是比較父節點</text:span><text:span text:style-name="T150">vs</text:span><text:span text:style-name="T151">子節點</text:span><text:span text:style-name="T60">；</text:span><text:span text:style-name="T182">葉節點沒有孩子 → 沒有東西可以比較 </text:span><text:span text:style-name="T43">→ 一定合法</text:span><text:span text:style-name="T60">。</text:span><text:span text:style-name="T49">)</text:span><text:span text:style-name="T60">，不需要 </text:span><text:span text:style-name="T49">Heapify</text:span><text:span text:style-name="T60">。</text:span></text:p>
          </table:table-cell>
        </table:table-row>
        <table:table-row table:style-name="表格12.1">
          <table:table-cell table:style-name="表格12.A1" office:value-type="string">
            <text:p text:style-name="P3" loext:marker-style-name="T42"><text:span text:style-name="T60">因此</text:span><text:span text:style-name="T134">只需從 </text:span><text:span text:style-name="T133">index ⌊n/2⌋ </text:span><text:span text:style-name="T134">往 </text:span><text:span text:style-name="T133">index 1 </text:span><text:span text:style-name="T134">逐一執行</text:span><text:span text:style-name="T60">。</text:span></text:p>
          </table:table-cell>
        </table:table-row>
      </table:table>
      <text:p text:style-name="P1"/>
      <text:p text:style-name="P40" loext:marker-style-name="T30"><text:span text:style-name="T32">範例：將 </text:span><text:span text:style-name="T46">[50, 30, 80, 10, 20, 70, 90] </text:span><text:span text:style-name="T32">建成 </text:span><text:span text:style-name="T46">Max Heap <text:s text:c="61"/></text:span></text:p>
      <text:p text:style-name="P40" loext:marker-style-name="T30"><text:span text:style-name="T46"/></text:p>
      <text:p text:style-name="P40" loext:marker-style-name="T30"><text:span text:style-name="T46">(</text:span><text:span text:style-name="T114">index = ⌊n/2⌋為最後一個非葉節點；index &gt; ⌊n/2⌋ 的節點全部都是葉節點</text:span><text:span text:style-name="T46">)</text:span></text:p>
      <text:p text:style-name="P1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3" loext:marker-style-name="T42"><text:span text:style-name="T60">初始陣列（</text:span><text:span text:style-name="T49">index </text:span><text:span text:style-name="T60">從 </text:span><text:span text:style-name="T49">1 </text:span><text:span text:style-name="T60">開始）：</text:span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index</text:span><text:span text:style-name="T60">： <text:s/></text:span><text:span text:style-name="T49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value</text:span><text:span text:style-name="T60">： <text:s/></text:span><text:span text:style-name="T49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3"/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50">n = 7</text:span><text:span text:style-name="T60">，</text:span><text:span text:style-name="T70">最後非葉節點 </text:span><text:span text:style-name="T71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60">（</text:span><text:span text:style-name="T88">index 4</text:span><text:span text:style-name="T89">、</text:span><text:span text:style-name="T88">5</text:span><text:span text:style-name="T89">、</text:span><text:span text:style-name="T88">6</text:span><text:span text:style-name="T89">、</text:span><text:span text:style-name="T88">7 </text:span><text:span text:style-name="T89">皆為葉節點</text:span><text:span text:style-name="T60">，不需 </text:span><text:span text:style-name="T49">Heapify</text:span><text:span text:style-name="T60">）</text:span></text:p>
          </table:table-cell>
        </table:table-row>
        <table:table-row table:style-name="表格13.1">
          <table:table-cell table:style-name="表格13.A1" office:value-type="string">
            <text:p text:style-name="P3"/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60">初始樹狀結構：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<text:s text:c="13"/>50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<text:s text:c="12"/>/ <text:s/>\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<text:s text:c="8"/>30 <text:s text:c="3"/>80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<text:s text:c="7"/>/ \ <text:s text:c="6"/>/ \</text:span><text:span text:style-name="T42"/></text:p>
          </table:table-cell>
        </table:table-row>
        <table:table-row table:style-name="表格13.1">
          <table:table-cell table:style-name="表格13.A1" office:value-type="string">
            <text:p text:style-name="P3" loext:marker-style-name="T42"><text:span text:style-name="T49"><text:s text:c="3"/>10 <text:s/>20 70 <text:s/>90</text:span><text:span text:style-name="T42"/></text:p>
          </table:table-cell>
        </table:table-row>
      </table:table>
      <text:p text:style-name="P1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3" loext:marker-style-name="T42"><text:span text:style-name="T49">→</text:span><text:span text:style-name="T61"> </text:span><text:span text:style-name="T145">Heapify(3)</text:span><text:span text:style-name="T146">：</text:span><text:span text:style-name="T145">index 3 = 80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</text:span><text:span text:style-name="T60">子節點：</text:span><text:span text:style-name="T49">index 6 = 70</text:span><text:span text:style-name="T60">，</text:span><text:span text:style-name="T49">index 7 = 90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</text:span><text:span text:style-name="T54">Max Heap </text:span><text:span text:style-name="T55">要求父 ≥ 子</text:span><text:span text:style-name="T60">，但 </text:span><text:span text:style-name="T49">80 &lt; 90 → </text:span><text:span text:style-name="T60">違反！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80 </text:span><text:span text:style-name="T60">與 </text:span><text:span text:style-name="T49">90 </text:span><text:span text:style-name="T60">交換</text:span></text:p>
          </table:table-cell>
        </table:table-row>
        <table:table-row table:style-name="表格14.1">
          <table:table-cell table:style-name="表格14.A1" office:value-type="string">
            <text:p text:style-name="P3"/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</text:span><text:span text:style-name="T60">交換後：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13"/>50</text:span><text:span text:style-name="T42"/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3" loext:marker-style-name="T42"><text:span text:style-name="T49"><text:s text:c="13"/>/ <text:s/>\</text:span><text:span text:style-name="T42"/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8"/>30 <text:s text:c="3"/>90 <text:s text:c="5"/>← 90 </text:span><text:span text:style-name="T60">上來了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5"/>/ \ <text:s text:c="6"/>/ \</text:span><text:span text:style-name="T42"/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/>10 <text:s/>20 70 <text:s/>80</text:span><text:span text:style-name="T42"/></text:p>
          </table:table-cell>
        </table:table-row>
        <table:table-row table:style-name="表格14.1">
          <table:table-cell table:style-name="表格14.A1" office:value-type="string">
            <text:p text:style-name="P3"/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</text:span><text:span text:style-name="T60">陣列：</text:span><text:span text:style-name="T49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3" loext:marker-style-name="T42"><text:span text:style-name="T49"><text:s text:c="2"/>80 </text:span><text:span text:style-name="T60">已是葉節點 → 停止</text:span></text:p>
          </table:table-cell>
        </table:table-row>
      </table:table>
      <text:p text:style-name="P1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3" loext:marker-style-name="T42"><text:span text:style-name="T49">→</text:span><text:span text:style-name="T145"> Heapify(2)</text:span><text:span text:style-name="T146">：</text:span><text:span text:style-name="T145">index 2 = 30</text:span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2"/></text:span><text:span text:style-name="T60">子節點：</text:span><text:span text:style-name="T49">index 4 = 10</text:span><text:span text:style-name="T60">，</text:span><text:span text:style-name="T49">index 5 = 20</text:span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2"/></text:span><text:span text:style-name="T52">30 ≥ 20 </text:span><text:span text:style-name="T53">且 </text:span><text:span text:style-name="T52">30 ≥ 10 → </text:span><text:span text:style-name="T53">符合 </text:span><text:span text:style-name="T52">Max Heap → </text:span><text:span text:style-name="T53">無需交換</text:span></text:p>
          </table:table-cell>
        </table:table-row>
        <table:table-row table:style-name="表格15.1">
          <table:table-cell table:style-name="表格15.A1" office:value-type="string">
            <text:p text:style-name="P3"/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2"/></text:span><text:span text:style-name="T60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11"/>50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10"/>/ <text:s/>\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8"/>30 <text:s text:c="3"/>90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7"/>/ \ <text:s text:c="2"/>/ \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5"/>10 <text:s/>20 70 <text:s/>80</text:span><text:span text:style-name="T42"/></text:p>
          </table:table-cell>
        </table:table-row>
        <table:table-row table:style-name="表格15.1">
          <table:table-cell table:style-name="表格15.A1" office:value-type="string">
            <text:p text:style-name="P3"/>
          </table:table-cell>
        </table:table-row>
        <table:table-row table:style-name="表格15.1">
          <table:table-cell table:style-name="表格15.A1" office:value-type="string">
            <text:p text:style-name="P3" loext:marker-style-name="T42"><text:span text:style-name="T49"><text:s text:c="2"/></text:span><text:span text:style-name="T60">陣列：</text:span><text:span text:style-name="T49">[50, 30, 90, 10, 20, 70, 80]</text:span></text:p>
          </table:table-cell>
        </table:table-row>
      </table:table>
      <text:p text:style-name="P1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3" loext:marker-style-name="T42"><text:span text:style-name="T49">→ </text:span><text:span text:style-name="T145">Heapify(1)</text:span><text:span text:style-name="T146">：</text:span><text:span text:style-name="T145">index 1 = 50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60">子節點：</text:span><text:span text:style-name="T49">index 2 = 30</text:span><text:span text:style-name="T60">，</text:span><text:span text:style-name="T49">index 3 = 90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86">較大子節點</text:span><text:span text:style-name="T60">為 </text:span><text:span text:style-name="T49">90 &gt; 50 → </text:span><text:span text:style-name="T50">50 </text:span><text:span text:style-name="T51">與 </text:span><text:span text:style-name="T50">90 </text:span><text:span text:style-name="T51">交換</text:span>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60">第 </text:span><text:span text:style-name="T49">1 </text:span><text:span text:style-name="T60">步交換後：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11"/>90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10"/>/ <text:s/>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8"/>30 <text:s text:c="3"/>50 <text:s text:c="5"/>← </text:span><text:span text:style-name="T56">50 </text:span><text:span text:style-name="T57">下沉到 </text:span><text:span text:style-name="T56">index 3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7"/>/ \ <text:s text:c="2"/>/ 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5"/>10 <text:s/>20 70 <text:s/>80</text:span><text:span text:style-name="T42"/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60">陣列：</text:span><text:span text:style-name="T49">[90, 30, 50, 10, 20, 70, 80]</text:span>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181">50 </text:span><text:span text:style-name="T182">繼續下沉</text:span><text:span text:style-name="T60">：子節點 </text:span><text:span text:style-name="T49">index 6 = 70</text:span><text:span text:style-name="T60">，</text:span><text:span text:style-name="T49">index 7 = 80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86">較大子節點</text:span><text:span text:style-name="T60">為 </text:span><text:span text:style-name="T49">80 &gt; 50 → </text:span><text:span text:style-name="T50">50 </text:span><text:span text:style-name="T51">與 </text:span><text:span text:style-name="T50">80 </text:span><text:span text:style-name="T51">交換</text:span>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60">第 </text:span><text:span text:style-name="T49">2 </text:span><text:span text:style-name="T60">步交換後：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11"/>90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10"/>/ <text:s/>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8"/>30 <text:s text:c="3"/>80 <text:s text:c="5"/>← 80 </text:span><text:span text:style-name="T60">上來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7"/>/ \ <text:s text:c="6"/>/ \</text:span><text:span text:style-name="T42"/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4"/>10 <text:s/>20 70 <text:s/>50 <text:s text:c="3"/>← 50 </text:span><text:span text:style-name="T60">落到葉節點</text:span>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50 </text:span><text:span text:style-name="T60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3" loext:marker-style-name="T42"><text:span text:style-name="T49"><text:s text:c="2"/></text:span><text:span text:style-name="T60">陣列：</text:span><text:span text:style-name="T49">[90, 30, 80, 10, 20, 70, 50]</text:span></text:p>
          </table:table-cell>
        </table:table-row>
      </table:table>
      <text:p text:style-name="P1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3" loext:marker-style-name="T42"><text:span text:style-name="T60">最終結果：</text:span><text:span text:style-name="T49">Max Heap ✓</text:span></text:p>
          </table:table-cell>
        </table:table-row>
        <table:table-row table:style-name="表格17.1">
          <table:table-cell table:style-name="表格17.A1" office:value-type="string">
            <text:p text:style-name="P3"/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49"><text:s text:c="11"/>90</text:span><text:span text:style-name="T42"/></text:p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49"><text:s text:c="10"/>/ <text:s/>\</text:span><text:span text:style-name="T42"/></text:p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49"><text:s text:c="8"/>30 <text:s text:c="3"/>80</text:span><text:span text:style-name="T42"/></text:p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49"><text:s text:c="7"/>/ \ <text:s text:c="6"/>/ \</text:span></text:p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49"><text:s text:c="3"/>10 <text:s/>20 70 <text:s/>50</text:span></text:p>
          </table:table-cell>
        </table:table-row>
        <table:table-row table:style-name="表格17.1">
          <table:table-cell table:style-name="表格17.A1" office:value-type="string">
            <text:p text:style-name="P3"/>
          </table:table-cell>
        </table:table-row>
        <table:table-row table:style-name="表格17.1">
          <table:table-cell table:style-name="表格17.A1" office:value-type="string">
            <text:p text:style-name="P3" loext:marker-style-name="T42"><text:span text:style-name="T60">陣列：</text:span><text:span text:style-name="T49">[90, 30, 80, 10, 20, 70, 50]</text:span></text:p>
          </table:table-cell>
        </table:table-row>
      </table:table>
      <text:p text:style-name="P1"/>
      <text:h text:style-name="P17" text:outline-level="2" loext:marker-style-name="T17"><text:span text:style-name="T27">★ </text:span><text:span text:style-name="T80">為何 </text:span><text:span text:style-name="T92">Bottom-Up Build Heap</text:span><text:span text:style-name="T93"> =</text:span><text:span text:style-name="T27"> </text:span><text:span text:style-name="T203">O(n)</text:span><text:span text:style-name="T18">？</text:span></text:h>
      <text:p text:style-name="P34" loext:marker-style-name="T30"><text:span text:style-name="T31">關鍵直覺：</text:span><text:span text:style-name="T153">每個節點 </text:span><text:span text:style-name="T157">Heapify </text:span><text:span text:style-name="T153">的代價 </text:span><text:span text:style-name="T157">= </text:span><text:span text:style-name="T153">它在樹中的「高度」</text:span><text:span text:style-name="T31">（</text:span><text:span text:style-name="T127">往下最多能走幾層</text:span><text:span text:style-name="T31">）。</text:span></text:p>
      <text:p text:style-name="P34" loext:marker-style-name="T30"><text:span text:style-name="T102">高度愈低的節點數量愈多，代價愈小；高度愈高的節點數量愈少，代價愈大</text:span><text:span text:style-name="T31">。</text:span><text:span text:style-name="T177">兩者相乘加總後收斂至 </text:span><text:span text:style-name="T184">O(n)</text:span><text:span text:style-name="T31">。</text:span></text:p>
      <text:p text:style-name="P1"/>
      <table:table table:name="表格18" table:style-name="表格18">
        <table:table-column table:style-name="表格18.A"/>
        <text:soft-page-break/>
        <table:table-row table:style-name="表格18.1">
          <table:table-cell table:style-name="表格18.A1" office:value-type="string">
            <text:p text:style-name="P3">★ 為何 Build Heap 是 O(n)？</text:p>
            <text:p text:style-name="P3"/>
            <text:p text:style-name="P3">Build Heap 由下往上<text:span text:style-name="T189">對每個非葉節點執行 Heapify</text:span>。</text:p>
            <text:p text:style-name="P3"/>
            <text:p text:style-name="P3">以完全二元樹為例：</text:p>
            <text:p text:style-name="P3"/>
            <text:p text:style-name="P3"><text:span text:style-name="T205">高度0（葉節點）約有 </text:span><text:span text:style-name="T206">n/2</text:span><text:span text:style-name="T205"> 個</text:span>，<text:span text:style-name="T207">每個最多移動 0 步</text:span></text:p>
            <text:p text:style-name="P3"><text:span text:style-name="T205">高度1 約有 </text:span><text:span text:style-name="T206">n/4</text:span><text:span text:style-name="T205"> 個</text:span>，<text:span text:style-name="T207">每個最多移動 1 步</text:span></text:p>
            <text:p text:style-name="P3"><text:span text:style-name="T205">高度2 約有 </text:span><text:span text:style-name="T206">n/8</text:span><text:span text:style-name="T205"> 個</text:span>，<text:span text:style-name="T207">每個最多移動 2 步</text:span></text:p>
            <text:p text:style-name="P3"><text:span text:style-name="T205">高度3 約有 </text:span><text:span text:style-name="T206">n/16</text:span><text:span text:style-name="T205"> 個</text:span>，<text:span text:style-name="T207">每個最多移動 3 步</text:span></text:p>
            <text:p text:style-name="P3">...</text:p>
            <text:p text:style-name="P3"/>
            <text:p text:style-name="P3">因此總成本為：</text:p>
            <text:p text:style-name="P3"/>
            <text:p text:style-name="P3">T(n) ≈ (n/2)×0</text:p>
            <text:p text:style-name="P3"/>
            <text:p text:style-name="P3">* (n/4)×1</text:p>
            <text:p text:style-name="P3">* (n/8)×2</text:p>
            <text:p text:style-name="P3">* (n/16)×3</text:p>
            <text:p text:style-name="P3">* ...</text:p>
            <text:p text:style-name="P3"/>
            <text:p text:style-name="P3">觀察可知：</text:p>
            <text:p text:style-name="P3"/>
            <text:p text:style-name="P4">越往上，Heapify 可能移動的步數增加 1，</text:p>
            <text:p text:style-name="P3"><text:span text:style-name="T164">但節點數量卻減少一半</text:span>。</text:p>
            <text:p text:style-name="P3"/>
            <text:p text:style-name="P3">例如：</text:p>
            <text:p text:style-name="P3"/>
            <text:p text:style-name="P3">高度1： (<text:span text:style-name="T207">n/4</text:span>)×<text:span text:style-name="T205">1</text:span></text:p>
            <text:p text:style-name="P3">高度2： (<text:span text:style-name="T207">n/8</text:span>)×<text:span text:style-name="T205">2</text:span></text:p>
            <text:p text:style-name="P3">高度3： (<text:span text:style-name="T207">n/16</text:span>)×<text:span text:style-name="T205">3</text:span></text:p>
            <text:p text:style-name="P3"/>
            <text:p text:style-name="P3">可以看到<text:span text:style-name="T121">節點數減少的速度比成本增加的速度更快</text:span>。</text:p>
            <text:p text:style-name="P3"/>
            <text:p text:style-name="P3">因此<text:span text:style-name="T94">所有層的成本加總後不會達到 O(n log n)，而是 O(n)</text:span>。</text:p>
            <text:p text:style-name="P3"/>
            <text:p text:style-name="P3">結論：</text:p>
            <text:p text:style-name="P3"/>
            <text:p text:style-name="P3"><text:span text:style-name="T108">葉節點很多，但幾乎不用移動</text:span>；</text:p>
            <text:p text:style-name="P3"><text:span text:style-name="T165">根附近節點雖然較貴，但數量很少</text:span>。</text:p>
            <text:p text:style-name="P3"/>
            <text:p text:style-name="P3"><text:span text:style-name="T94">所以 </text:span><text:span text:style-name="T166">Build Heap 的時間複雜度為 O(n)</text:span>。</text:p>
          </table:table-cell>
        </table:table-row>
        <table:table-row table:style-name="表格18.1">
          <table:table-cell table:style-name="表格18.A1" office:value-type="string">
            <text:p text:style-name="P3"/>
          </table:table-cell>
        </table:table-row>
        <table:table-row table:style-name="表格18.1">
          <table:table-cell table:style-name="表格18.A1" office:value-type="string">
            <text:p text:style-name="P3" loext:marker-style-name="T42"><text:span text:style-name="T60">白話理解：</text:span><text:span text:style-name="T112">葉節點約佔一半，</text:span><text:span text:style-name="T113">Heapify </text:span><text:span text:style-name="T112">代價為 </text:span><text:span text:style-name="T113">0</text:span><text:span text:style-name="T60">；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3" loext:marker-style-name="T135"><text:span text:style-name="T136">往上每層節點數減半，代價只加 </text:span><text:span text:style-name="T135">1</text:span><text:span text:style-name="T136">。</text:span></text:p>
          </table:table-cell>
        </table:table-row>
        <table:table-row table:style-name="表格18.1">
          <table:table-cell table:style-name="表格18.A1" office:value-type="string">
            <text:p text:style-name="P3" loext:marker-style-name="T42"><text:span text:style-name="T201">整體工作量被大量葉節點的「零代價」攤平</text:span><text:span text:style-name="T60">，總代價 ∝ </text:span><text:span text:style-name="T49">n</text:span><text:span text:style-name="T60">。</text:span></text:p>
          </table:table-cell>
        </table:table-row>
      </table:table>
      <text:p text:style-name="P1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33" loext:marker-style-name="T5"><text:span text:style-name="T6">方法</text:span><text:span text:style-name="T5"/></text:p>
            </table:table-cell>
            <table:table-cell table:style-name="表格19.A1" office:value-type="string">
              <text:p text:style-name="P33" loext:marker-style-name="T5"><text:span text:style-name="T6">時間複雜度</text:span><text:span text:style-name="T5"/></text:p>
            </table:table-cell>
            <table:table-cell table:style-name="表格19.A1" office:value-type="string">
              <text:p text:style-name="P33" loext:marker-style-name="T5"><text:span text:style-name="T6">適用情境</text:span><text:span text:style-name="T5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33" loext:marker-style-name="T137"><text:span text:style-name="T138">逐個 </text:span><text:span text:style-name="T137">Insert</text:span></text:p>
          </table:table-cell>
          <table:table-cell table:style-name="表格19.A2" office:value-type="string">
            <text:p text:style-name="P33" loext:marker-style-name="T42"><text:span text:style-name="T49">O(</text:span><text:span text:style-name="T50">n log n</text:span><text:span text:style-name="T49">)</text:span></text:p>
          </table:table-cell>
          <table:table-cell table:style-name="表格19.A2" office:value-type="string">
            <text:p text:style-name="P33" loext:marker-style-name="T42"><text:span text:style-name="T60">動態逐一加入</text:span><text:span text:style-name="T42"/></text:p>
          </table:table-cell>
        </table:table-row>
        <table:table-row table:style-name="表格19.1">
          <table:table-cell table:style-name="表格19.A3" office:value-type="string">
            <text:p text:style-name="P33" loext:marker-style-name="T137"><text:span text:style-name="T137">Bottom-Up Build Heap</text:span><text:span text:style-name="T137"/></text:p>
          </table:table-cell>
          <table:table-cell table:style-name="表格19.A3" office:value-type="string">
            <text:p text:style-name="P33" loext:marker-style-name="T42"><text:span text:style-name="T49">O(</text:span><text:span text:style-name="T50">n</text:span><text:span text:style-name="T49">) ★</text:span></text:p>
          </table:table-cell>
          <table:table-cell table:style-name="表格19.A3" office:value-type="string">
            <text:p text:style-name="P33" loext:marker-style-name="T42"><text:span text:style-name="T60">一次性建立</text:span><text:span text:style-name="T42"/></text:p>
          </table:table-cell>
        </table:table-row>
      </table:table>
      <text:p text:style-name="P1"/>
      <text:p text:style-name="P1"/>
      <text:h text:style-name="P19" text:outline-level="1" loext:marker-style-name="T3"><text:span text:style-name="T4">五、</text:span><text:span text:style-name="T10">Heap Sort</text:span><text:span text:style-name="T4">（堆積排序）</text:span></text:h>
      <text:p text:style-name="P34" loext:marker-style-name="T30"><text:span text:style-name="T48">Heap Sort </text:span><text:span text:style-name="T31">利用 </text:span><text:span text:style-name="T48">Heap </text:span><text:span text:style-name="T31">結構進行排序，分為兩個階段：</text:span></text:p>
      <text:p text:style-name="P1"/>
      <text:list xml:id="list3862013675" text:style-name="WWNum2">
        <text:list-item>
          <text:p text:style-name="P41" loext:marker-style-name="T30"><text:span text:style-name="T48">Phase 1</text:span><text:span text:style-name="T31">：</text:span><text:span text:style-name="T125">Build Heap</text:span><text:span text:style-name="T48"> — </text:span><text:span text:style-name="T208">將原始陣列建成 </text:span><text:span text:style-name="T209">Max Heap</text:span><text:span text:style-name="T31">，時間 </text:span><text:span text:style-name="T48">O(n)</text:span><text:span text:style-name="T31">。</text:span></text:p>
        </text:list-item>
        <text:list-item>
          <text:p text:style-name="P41" loext:marker-style-name="T30"><text:span text:style-name="T48">Phase 2</text:span><text:span text:style-name="T31">：</text:span><text:span text:style-name="T81">反覆 </text:span><text:span text:style-name="T90">Extract-Max</text:span><text:span text:style-name="T48"> — </text:span><text:span text:style-name="T65">取出 </text:span><text:span text:style-name="T72">Root</text:span><text:span text:style-name="T65">（最大值），放到陣列末端</text:span><text:span text:style-name="T31">，</text:span><text:span text:style-name="T33">再 </text:span><text:span text:style-name="T45">Heapify</text:span><text:span text:style-name="T31">，重複 </text:span><text:span text:style-name="T47">n-1</text:span><text:span text:style-name="T48"> </text:span><text:span text:style-name="T31">次，每次 </text:span><text:span text:style-name="T48">O(</text:span><text:span text:style-name="T157">log n</text:span><text:span text:style-name="T48">)</text:span><text:span text:style-name="T31">。</text:span></text:p>
        </text:list-item>
      </text:list>
      <text:p text:style-name="P1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3" loext:marker-style-name="T42"><text:span text:style-name="T49">Heap Sort </text:span><text:span text:style-name="T60">總時間 </text:span><text:span text:style-name="T49">= O(</text:span><text:span text:style-name="T50">n</text:span><text:span text:style-name="T49">) + O(</text:span><text:span text:style-name="T50">n log n</text:span><text:span text:style-name="T49">) = O(</text:span><text:span text:style-name="T150">n log n</text:span><text:span text:style-name="T49">)</text:span></text:p>
          </table:table-cell>
        </table:table-row>
        <table:table-row table:style-name="表格20.1">
          <table:table-cell table:style-name="表格20.A1" office:value-type="string">
            <text:p text:style-name="P3" loext:marker-style-name="T42"><text:span text:style-name="T60">空間複雜度 </text:span><text:span text:style-name="T49">= O(1)</text:span><text:span text:style-name="T60">（</text:span><text:span text:style-name="T49">In-place</text:span><text:span text:style-name="T60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3" loext:marker-style-name="T42"><text:span text:style-name="T60">穩定性 </text:span><text:span text:style-name="T49">= </text:span><text:span text:style-name="T60">不穩定（</text:span><text:span text:style-name="T49">Unstable</text:span><text:span text:style-name="T60">）</text:span></text:p>
          </table:table-cell>
        </table:table-row>
      </table:table>
      <text:p text:style-name="P1"/>
      <text:p text:style-name="P34" loext:marker-style-name="T30"><text:span text:style-name="T32">範例：對 </text:span><text:span text:style-name="T46">[4, 2, 7, 1, 5] </text:span><text:span text:style-name="T32">排序</text:span></text:p>
      <text:p text:style-name="P1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3" loext:marker-style-name="T42"><text:span text:style-name="T49">Phase 1 — </text:span><text:span text:style-name="T137">Build Max Heap</text:span><text:span text:style-name="T60">：</text:span></text:p>
          </table:table-cell>
        </table:table-row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60">原始：</text:span><text:span text:style-name="T49">[4, 2, 7, 1, 5]</text:span></text:p>
          </table:table-cell>
        </table:table-row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50">n=5</text:span><text:span text:style-name="T60">，</text:span><text:span text:style-name="T97">最後非葉節點 </text:span><text:span text:style-name="T96">= </text:span><text:span text:style-name="T85">⌊5/2⌋ = 2</text:span></text:p>
          </table:table-cell>
        </table:table-row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60">初始樹狀：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8"/>4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5"/></text:span><text:span text:style-name="T85"><text:s/>2</text:span><text:span text:style-name="T49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5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4"/>1 <text:s text:c="2"/>5</text:span><text:span text:style-name="T42"/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133">Heapify(2)</text:span><text:span text:style-name="T60">：</text:span><text:span text:style-name="T50">2 </text:span><text:span text:style-name="T51">的子節點 </text:span><text:span text:style-name="T50">1, 5</text:span><text:span text:style-name="T60">；</text:span><text:span text:style-name="T150">5 &gt; 2 → </text:span><text:span text:style-name="T151">交換</text:span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8"/>4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6"/>5 <text:s text:c="2"/>7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5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4"/>1 <text:s text:c="2"/>2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133">Heapify(1)</text:span><text:span text:style-name="T60">：</text:span><text:span text:style-name="T50">4 </text:span><text:span text:style-name="T51">的子節點 </text:span><text:span text:style-name="T50">5, 7</text:span><text:span text:style-name="T60">；</text:span><text:span text:style-name="T150">7 &gt; 4 → </text:span><text:span text:style-name="T151">交換</text:span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8"/>7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6"/>5 <text:s text:c="2"/>4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5"/>/ \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<text:s text:c="4"/>1 <text:s text:c="2"/>2</text:span><text:span text:style-name="T42"/></text:p>
          </table:table-cell>
        </table:table-row>
        <table:table-row table:style-name="表格21.1">
          <table:table-cell table:style-name="表格21.A1" office:value-type="string">
            <text:p text:style-name="P3"/>
          </table:table-cell>
        </table:table-row>
        <table:table-row table:style-name="表格21.1">
          <table:table-cell table:style-name="表格21.A1" office:value-type="string">
            <text:p text:style-name="P3" loext:marker-style-name="T42"><text:span text:style-name="T49">Max Heap </text:span><text:span text:style-name="T60">完成：</text:span><text:span text:style-name="T49">[7, 5, 4, 1, 2]</text:span></text:p>
          </table:table-cell>
        </table:table-row>
      </table:table>
      <text:p text:style-name="P1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3" loext:marker-style-name="T42"><text:span text:style-name="T49">Phase 2 — </text:span><text:span text:style-name="T183">反覆</text:span><text:span text:style-name="T60"> </text:span><text:span text:style-name="T85">Extract-Max</text:span><text:span text:style-name="T60">：</text:span>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Step 1</text:span><text:span text:style-name="T60">：</text:span><text:span text:style-name="T62">取出 </text:span><text:span text:style-name="T63">Root=7</text:span><text:span text:style-name="T62">，末端 </text:span><text:span text:style-name="T63">2 </text:span><text:span text:style-name="T62">移到 </text:span><text:span text:style-name="T63">Root</text:span><text:span text:style-name="T60">，</text:span><text:span text:style-name="T54">Heapify</text:span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2"/>→ [5, 2, 4, 1 |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8"/>5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6"/>2 <text:s text:c="2"/>4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5"/>/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4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Step 2</text:span><text:span text:style-name="T60">：</text:span><text:span text:style-name="T62">取出 </text:span><text:span text:style-name="T63">Root=5</text:span><text:span text:style-name="T62">，末端 </text:span><text:span text:style-name="T63">1 </text:span><text:span text:style-name="T62">移到 </text:span><text:span text:style-name="T63">Root</text:span><text:span text:style-name="T60">，</text:span><text:span text:style-name="T54">Heapify</text:span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2"/>→ [4, 2, 1 | 5,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8"/>4</text:span><text:span text:style-name="T42"/>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6"/>2 <text:s text:c="2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Step 3</text:span><text:span text:style-name="T60">：</text:span><text:span text:style-name="T62">取出 </text:span><text:span text:style-name="T63">Root=4</text:span><text:span text:style-name="T62">，末端 </text:span><text:span text:style-name="T63">1 </text:span><text:span text:style-name="T62">移到 </text:span><text:span text:style-name="T63">Root</text:span><text:span text:style-name="T60">，</text:span><text:span text:style-name="T58">Heapify</text:span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2"/>→ [2, 1 | 4, 5,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8"/>2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7"/>/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6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Step 4</text:span><text:span text:style-name="T60">：</text:span><text:span text:style-name="T62">取出 </text:span><text:span text:style-name="T63">Root=2</text:span><text:span text:style-name="T62">，末端 </text:span><text:span text:style-name="T63">1 </text:span><text:span text:style-name="T62">移到 </text:span><text:span text:style-name="T63">Root</text:span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2"/>→ [1 | 2, 4, 5, 7]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 loext:marker-style-name="T42"><text:span text:style-name="T49"><text:s text:c="8"/>1</text:span><text:span text:style-name="T42"/>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3" loext:marker-style-name="T181"><text:span text:style-name="T182">最終排序（升冪）：</text:span><text:span text:style-name="T181">[1, 2, 4, 5, 7] ✓</text:span></text:p>
          </table:table-cell>
        </table:table-row>
      </table:table>
      <text:p text:style-name="P1"/>
      <text:p text:style-name="P1"/>
      <text:h text:style-name="P19" text:outline-level="1" loext:marker-style-name="T3"><text:span text:style-name="T4">六、優先佇列（</text:span><text:span text:style-name="T10">Priority Queue</text:span><text:span text:style-name="T4">）實作方式比較</text:span></text:h>
      <text:p text:style-name="P34" loext:marker-style-name="T30"><text:span text:style-name="T72">Priority Queue</text:span><text:span text:style-name="T65">（優先佇列）</text:span><text:span text:style-name="T31">是</text:span><text:span text:style-name="T127">每次取出「優先值最高」元素的資料結構</text:span><text:span text:style-name="T31">。三種常見實作比較：</text:span></text:p>
      <text:p text:style-name="P1"/>
      <table:table table:name="表格23" table:style-name="表格23">
        <table:table-column table:style-name="表格23.A" table:number-columns-repeated="3"/>
        <table:table-header-rows>
          <table:table-row table:style-name="表格23.1">
            <table:table-cell table:style-name="表格23.A1" office:value-type="string">
              <text:p text:style-name="P33" loext:marker-style-name="T5"><text:span text:style-name="T6">實作方式</text:span><text:span text:style-name="T5"/></text:p>
            </table:table-cell>
            <table:table-cell table:style-name="表格23.A1" office:value-type="string">
              <text:p text:style-name="P33" loext:marker-style-name="T5"><text:span text:style-name="T13">Insert</text:span><text:span text:style-name="T5"/></text:p>
            </table:table-cell>
            <table:table-cell table:style-name="表格23.A1" office:value-type="string">
              <text:p text:style-name="P5"><text:span text:style-name="T210">Extract-Max</text:span><text:span text:style-name="T212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33" loext:marker-style-name="T42"><text:span text:style-name="T138">排序好的</text:span><text:span text:style-name="T60">陣列</text:span></text:p>
          </table:table-cell>
          <table:table-cell table:style-name="表格23.A2" office:value-type="string">
            <text:p text:style-name="P33" loext:marker-style-name="T42"><text:span text:style-name="T49">O(n)</text:span><text:span text:style-name="T42"/></text:p>
          </table:table-cell>
          <table:table-cell table:style-name="表格23.A2" office:value-type="string">
            <text:p text:style-name="P33" loext:marker-style-name="T42"><text:span text:style-name="T49">O(1) <text:s/></text:span><text:span text:style-name="T60">取快插慢</text:span></text:p>
          </table:table-cell>
        </table:table-row>
        <table:table-row table:style-name="表格23.1">
          <table:table-cell table:style-name="表格23.A2" office:value-type="string">
            <text:p text:style-name="P33" loext:marker-style-name="T42"><text:span text:style-name="T138">未排序的</text:span><text:span text:style-name="T60">陣列</text:span></text:p>
          </table:table-cell>
          <table:table-cell table:style-name="表格23.A2" office:value-type="string">
            <text:p text:style-name="P33" loext:marker-style-name="T42"><text:span text:style-name="T49">O(1)</text:span><text:span text:style-name="T42"/></text:p>
          </table:table-cell>
          <table:table-cell table:style-name="表格23.A2" office:value-type="string">
            <text:p text:style-name="P33" loext:marker-style-name="T42"><text:span text:style-name="T49">O(n) <text:s/></text:span><text:span text:style-name="T60">插快取慢</text:span></text:p>
          </table:table-cell>
        </table:table-row>
        <table:table-row table:style-name="表格23.1">
          <table:table-cell table:style-name="表格23.A4" office:value-type="string">
            <text:p text:style-name="P33" loext:marker-style-name="T42"><text:span text:style-name="T49">Max Heap ★</text:span><text:span text:style-name="T42"/></text:p>
          </table:table-cell>
          <table:table-cell table:style-name="表格23.A4" office:value-type="string">
            <text:p text:style-name="P33" loext:marker-style-name="T150"><text:span text:style-name="T150">O(log n)</text:span><text:span text:style-name="T150"/></text:p>
          </table:table-cell>
          <table:table-cell table:style-name="表格23.A4" office:value-type="string">
            <text:p text:style-name="P33" loext:marker-style-name="T42"><text:span text:style-name="T133">O(log n)</text:span><text:span text:style-name="T49"> <text:s/></text:span><text:span text:style-name="T60">兩者均衡</text:span></text:p>
          </table:table-cell>
        </table:table-row>
      </table:table>
      <text:p text:style-name="P1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3" loext:marker-style-name="T42"><text:span text:style-name="T49">💡 </text:span><text:span text:style-name="T60">考試重點：</text:span></text:p>
          </table:table-cell>
        </table:table-row>
        <table:table-row table:style-name="表格24.1">
          <table:table-cell table:style-name="表格24.A1" office:value-type="string">
            <text:p text:style-name="P3" loext:marker-style-name="T42"><text:span text:style-name="T85">Heap </text:span><text:span text:style-name="T86">是 </text:span><text:span text:style-name="T85">Priority Queue </text:span><text:span text:style-name="T86">最常見的實作</text:span><text:span text:style-name="T60">，</text:span></text:p>
          </table:table-cell>
        </table:table-row>
        <table:table-row table:style-name="表格24.1">
          <table:table-cell table:style-name="表格24.A1" office:value-type="string">
            <text:p text:style-name="P3" loext:marker-style-name="T42"><text:span text:style-name="T60">原因是 </text:span><text:span text:style-name="T150">Insert </text:span><text:span text:style-name="T151">和 </text:span><text:span text:style-name="T150">Extract </text:span><text:span text:style-name="T151">都是 </text:span><text:span text:style-name="T150">O(log n)</text:span><text:span text:style-name="T60">，</text:span></text:p>
          </table:table-cell>
        </table:table-row>
        <table:table-row table:style-name="表格24.1">
          <table:table-cell table:style-name="表格24.A1" office:value-type="string">
            <text:p text:style-name="P3" loext:marker-style-name="T42"><text:span text:style-name="T60">是</text:span><text:span text:style-name="T182">三種方案中最均衡的折衷解</text:span><text:span text:style-name="T60">。</text:span></text:p>
          </table:table-cell>
        </table:table-row>
        <table:table-row table:style-name="表格24.1">
          <table:table-cell table:style-name="表格24.A1" office:value-type="string">
            <text:p text:style-name="P3"/>
          </table:table-cell>
        </table:table-row>
        <table:table-row table:style-name="表格24.1">
          <table:table-cell table:style-name="表格24.A1" office:value-type="string">
            <text:p text:style-name="P3" loext:marker-style-name="T42"><text:span text:style-name="T60">應用場景：印表機緩衝（高優先文件先印）、作業系統 </text:span><text:span text:style-name="T49">CPU </text:span><text:span text:style-name="T60">排程。</text:span></text:p>
          </table:table-cell>
        </table:table-row>
      </table:table>
      <text:p text:style-name="P1"/>
      <text:p text:style-name="P1"><text:soft-page-break/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3" loext:marker-style-name="T42"><text:span text:style-name="T49">① </text:span><text:span text:style-name="T138">排序好的</text:span><text:span text:style-name="T60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Insert 50</text:span><text:span text:style-name="T60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Before: <text:s/>[10, 30, 70, 8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</text:span><text:span text:style-name="T60">挪動 </text:span><text:span text:style-name="T49">70, 80 </text:span><text:span text:style-name="T60">後</text:span><text:span text:style-name="T49">: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After: <text:s text:c="2"/>[10, 30, </text:span><text:span text:style-name="T54">50</text:span><text:span text:style-name="T49">, 70, 80] <text:s text:c="2"/>← </text:span><text:span text:style-name="T50">O(n)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Extract-Max</text:span><text:span text:style-name="T60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Before: <text:s/>[10, 30, 50, 70, 8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After: <text:s text:c="2"/>[10, 30, 50, 70] <text:s text:c="2"/></text:span><text:span text:style-name="T60">取出 </text:span><text:span text:style-name="T49">80 <text:s text:c="2"/>←</text:span><text:span text:style-name="T50"> O(1)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② </text:span><text:span text:style-name="T138">未排序的</text:span><text:span text:style-name="T60">陣列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Insert 50</text:span><text:span text:style-name="T60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Before: <text:s/>[80, 10, 30, 7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After: <text:s text:c="2"/>[80, 10, 30, 70, 50] <text:s text:c="2"/>← </text:span><text:span text:style-name="T50">O(1)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Extract-Max</text:span><text:span text:style-name="T60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Before: <text:s/>[80, 10, 30, 70, 50]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</text:span><text:span text:style-name="T60">掃描</text:span><text:span text:style-name="T49">: 80? 10? 30? 70? 50? <text:s/>→ </text:span><text:span text:style-name="T60">找到 </text:span><text:span text:style-name="T49">80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After: <text:s text:c="2"/>[10, 30, 70, 50] <text:s text:c="2"/></text:span><text:span text:style-name="T60">取出 </text:span><text:span text:style-name="T49">80 <text:s text:c="2"/>← </text:span><text:span text:style-name="T50">O(n)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③ Max Heap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Insert 50</text:span><text:span text:style-name="T60">：放末端，</text:span><text:span text:style-name="T49">Bubble Up </text:span><text:span text:style-name="T60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9"/>80 <text:s text:c="16"/>8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9"/>/ <text:s/>\ <text:s text:c="15"/>/ <text:s text:c="2"/>\</text:span><text:span text:style-name="T42"/></text:p>
          </table:table-cell>
        </table:table-row>
        <text:soft-page-break/>
        <table:table-row table:style-name="表格25.1">
          <table:table-cell table:style-name="表格25.A1" office:value-type="string">
            <text:p text:style-name="P3" loext:marker-style-name="T42"><text:span text:style-name="T49"><text:s text:c="6"/>70 <text:s text:c="2"/>30 <text:s text:c="3"/>→ <text:s/>70 <text:s text:c="2"/>3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6"/>/ <text:s text:c="18"/>/ <text:s text:c="2"/>\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4"/>10 <text:s text:c="14"/>10 <text:s text:c="2"/>50 ← </text:span><text:span text:style-name="T181">50 </text:span><text:span text:style-name="T182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61"/></text:span><text:span text:style-name="T150">O(log n)</text:span></text:p>
          </table:table-cell>
        </table:table-row>
        <table:table-row table:style-name="表格25.1">
          <table:table-cell table:style-name="表格25.A1" office:value-type="string">
            <text:p text:style-name="P3"/>
          </table:table-cell>
        </table:table-row>
        <table:table-row table:style-name="表格25.1">
          <table:table-cell table:style-name="表格25.A35" office:value-type="string">
            <text:p text:style-name="P3"><text:span text:style-name="T49">Extract-Max</text:span><text:span text:style-name="T60">：</text:span><text:span text:style-name="T68">取出 </text:span><text:span text:style-name="T69">Root=80</text:span><text:span text:style-name="T60">，</text:span><text:span text:style-name="T200">末端</text:span><text:span text:style-name="T162"> </text:span><text:span text:style-name="T163">50 </text:span><text:span text:style-name="T200">補位</text:span><text:span text:style-name="T60">，</text:span><text:span text:style-name="T49">Heapify </text:span><text:span text:style-name="T60">往下交換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9"/>80 <text:s text:c="16"/>50 <text:s text:c="17"/>7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8"/>/ <text:s text:c="2"/>\ <text:s text:c="15"/>/ <text:s text:c="2"/>\ <text:s text:c="16"/>/ <text:s text:c="2"/>\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5"/>70 <text:s text:c="2"/>30 <text:s text:c="2"/>→ <text:s text:c="3"/>70 <text:s text:c="2"/>30 <text:s text:c="3"/>→ <text:s text:c="3"/>50 <text:s text:c="2"/>3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5"/>/ <text:s text:c="2"/>\ <text:s text:c="15"/>/ <text:s text:c="20"/>/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2"/>10 <text:s text:c="2"/>50 <text:s text:c="9"/>10 <text:s text:c="18"/>10</text:span><text:span text:style-name="T42"/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3"/></text:span><text:span text:style-name="T60">取出 </text:span><text:span text:style-name="T49">80 <text:s text:c="5"/>50 </text:span><text:span text:style-name="T60">移到 </text:span><text:span text:style-name="T49">Root <text:s text:c="4"/>Heapify </text:span><text:span text:style-name="T60">完成</text:span></text:p>
          </table:table-cell>
        </table:table-row>
        <table:table-row table:style-name="表格25.1">
          <table:table-cell table:style-name="表格25.A1" office:value-type="string">
            <text:p text:style-name="P3" loext:marker-style-name="T42"><text:span text:style-name="T49"><text:s text:c="57"/></text:span><text:span text:style-name="T150">O(log n)</text:span></text:p>
          </table:table-cell>
        </table:table-row>
      </table:table>
      <text:p text:style-name="P1"/>
      <text:h text:style-name="P2" text:outline-level="1" loext:marker-style-name="T215"><text:span text:style-name="T216">七、</text:span><text:span text:style-name="T215">Interval Heap</text:span><text:span text:style-name="T216">（區間堆積）【</text:span><text:span text:style-name="T215">110</text:span><text:span text:style-name="T216">地</text:span><text:span text:style-name="T215">Q4</text:span><text:span text:style-name="T216">】</text:span></text:h>
      <text:h text:style-name="P18" text:outline-level="2" loext:marker-style-name="T20"><text:span text:style-name="T20">7-1 <text:s/></text:span><text:span text:style-name="T21">問題起源：</text:span><text:span text:style-name="T22">普通 </text:span><text:span text:style-name="T23">Heap</text:span><text:span text:style-name="T20"> </text:span><text:span text:style-name="T178">只能快速取一端</text:span></text:h>
      <text:p text:style-name="P6" loext:marker-style-name="T217"><text:span text:style-name="T218">回顧你已學過的 </text:span><text:span text:style-name="T217">Max Heap</text:span><text:span text:style-name="T218">：</text:span></text:p>
      <text:p text:style-name="P43" loext:marker-style-name="T234"><text:span text:style-name="T234"><text:s text:c="11"/>100 <text:s text:c="6"/>← </text:span><text:span text:style-name="T235">Root</text:span><text:span text:style-name="T234"> = 全域最大值（</text:span><text:span text:style-name="T235">O(1) 取得</text:span><text:span text:style-name="T234">）</text:span></text:p>
      <text:p text:style-name="P8"><text:s text:c="10"/>/ <text:s text:c="3"/>\</text:p>
      <text:p text:style-name="P7" loext:marker-style-name="T234"><text:span text:style-name="T234"><text:s text:c="8"/>90 <text:s text:c="5"/>80</text:span><text:span text:style-name="T234"/></text:p>
      <text:p text:style-name="P7" loext:marker-style-name="T234"><text:span text:style-name="T234"><text:s text:c="7"/>/ <text:s/>\</text:span><text:span text:style-name="T234"/></text:p>
      <text:p text:style-name="P7" loext:marker-style-name="T234"><text:span text:style-name="T234"><text:s text:c="6"/>70 <text:s text:c="2"/>60</text:span><text:span text:style-name="T234"/></text:p>
      <text:p text:style-name="P7"/>
      <text:p text:style-name="P7" loext:marker-style-name="T234"><text:span text:style-name="T234"><text:s text:c="2"/>Find-Max <text:s/>= O(1) <text:s/>直接</text:span><text:span text:style-name="T235">看 Root</text:span></text:p>
      <text:p text:style-name="P45" loext:marker-style-name="T234"><text:span text:style-name="T234"><text:s text:c="2"/></text:span><text:span text:style-name="T73">Find-Min <text:s/>= O(n)</text:span><text:span text:style-name="T234"> <text:s/></text:span><text:span text:style-name="T239">最小值藏在某個葉節點，不知在哪，</text:span><text:span text:style-name="T204">只能全掃</text:span></text:p>
      <text:p text:style-name="P9"/>
      <text:p text:style-name="P6" loext:marker-style-name="T217"><text:span text:style-name="T217">Max Heap </text:span><text:span text:style-name="T218">有一個致命弱點：</text:span></text:p>
      <text:list text:style-name="WWNum14">
        <text:list-item>
          <text:p text:style-name="P30" loext:marker-style-name="T217"><text:span text:style-name="T218">取最大值 → </text:span><text:span text:style-name="T217">O(1)</text:span><text:span text:style-name="T218">，非常快，因為 </text:span><text:span text:style-name="T217">Root </text:span><text:span text:style-name="T218">就是最大值。</text:span></text:p>
        </text:list-item>
        <text:list-item>
          <text:p text:style-name="P30" loext:marker-style-name="T217"><text:span text:style-name="T66">取最小值 → </text:span><text:span text:style-name="T67">O(n)</text:span><text:span text:style-name="T218">，</text:span><text:span text:style-name="T82">非常慢，因為最小值可能藏在任何一個葉節點，沒有規律可循。</text:span></text:p>
        </text:list-item>
      </text:list>
      <text:p text:style-name="P9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 loext:marker-style-name="T219"><text:span text:style-name="T219">❓ </text:span><text:span text:style-name="T220">想一想：最小值在哪裡？</text:span></text:p>
            <text:p text:style-name="P9" loext:marker-style-name="T229"><text:span text:style-name="T230">以上面的 </text:span><text:span text:style-name="T229">Max Heap </text:span><text:span text:style-name="T230">為例，最小值 </text:span><text:span text:style-name="T229">60 </text:span><text:span text:style-name="T230">藏在葉節點。</text:span></text:p>
            <text:p text:style-name="P47" loext:marker-style-name="T229"><text:span text:style-name="T230">如果樹有 </text:span><text:span text:style-name="T229">n </text:span><text:span text:style-name="T230">個節點，不掃到最後一層根本不知道最小值在哪。</text:span></text:p>
          </table:table-cell>
        </table:table-row>
      </table:table>
      <text:p text:style-name="P10"><text:soft-page-break/></text:p>
      <text:h text:style-name="P18" text:outline-level="2" loext:marker-style-name="T20"><text:span text:style-name="T20">7-2 <text:s/></text:span><text:span text:style-name="T22">現實需求</text:span><text:span text:style-name="T21">：</text:span><text:span text:style-name="T178">兩端都要快</text:span></text:h>
      <text:p text:style-name="P6" loext:marker-style-name="T217"><text:span text:style-name="T218">在</text:span><text:span text:style-name="T221">很多實際應用中</text:span><text:span text:style-name="T218">，我們</text:span><text:span text:style-name="T129">同時需要快速取出最大值和最小值</text:span><text:span text:style-name="T218">：</text:span></text:p>
      <text:p text:style-name="P9"/>
      <text:p text:style-name="P43" loext:marker-style-name="T234"><text:span text:style-name="T234"><text:s text:c="2"/>📈 股票交易系統：</text:span><text:span text:style-name="T234"/></text:p>
      <text:p text:style-name="P7" loext:marker-style-name="T234"><text:span text:style-name="T234"><text:s text:c="7"/>→ 最高價（最大值）O(1) 快速取得</text:span><text:span text:style-name="T234"/></text:p>
      <text:p text:style-name="P7" loext:marker-style-name="T234"><text:span text:style-name="T234"><text:s text:c="7"/>→ 最低價（最小值）O(1) 快速取得</text:span><text:span text:style-name="T234"/></text:p>
      <text:p text:style-name="P7"/>
      <text:p text:style-name="P7" loext:marker-style-name="T234"><text:span text:style-name="T234"><text:s text:c="2"/>🖥️ <text:s/>CPU 排程器（雙優先權模式）：</text:span><text:span text:style-name="T234"/></text:p>
      <text:p text:style-name="P7" loext:marker-style-name="T234"><text:span text:style-name="T234"><text:s text:c="7"/>→ 最高優先權工作 <text:s/>→ 優先執行</text:span><text:span text:style-name="T234"/></text:p>
      <text:p text:style-name="P7" loext:marker-style-name="T234"><text:span text:style-name="T234"><text:s text:c="7"/>→ 最低優先權工作 <text:s/>→ 必要時踢出讓位</text:span><text:span text:style-name="T234"/></text:p>
      <text:p text:style-name="P7"/>
      <text:p text:style-name="P7" loext:marker-style-name="T234"><text:span text:style-name="T234"><text:s text:c="2"/>❌ </text:span><text:span text:style-name="T235">普通 Max Heap</text:span><text:span text:style-name="T234"> 做不到：</text:span><text:span text:style-name="T158">找最小值要</text:span><text:span text:style-name="T204"> O(n)</text:span></text:p>
      <text:p text:style-name="P45" loext:marker-style-name="T234"><text:span text:style-name="T234"><text:s text:c="2"/>❌ </text:span><text:span text:style-name="T235">普通 Min Heap</text:span><text:span text:style-name="T234"> 做不到：</text:span><text:span text:style-name="T158">找最大值要</text:span><text:span text:style-name="T204"> O(n)</text:span></text:p>
      <text:p text:style-name="P9"/>
      <text:p text:style-name="P6" loext:marker-style-name="T217"><text:span text:style-name="T218">這類需求稱為 </text:span><text:span text:style-name="T217">Double-Ended Priority Queue</text:span><text:span text:style-name="T218">（</text:span><text:span text:style-name="T217">DEPQ</text:span><text:span text:style-name="T218">，</text:span><text:span text:style-name="T103">雙端優先佇列</text:span><text:span text:style-name="T218">），</text:span><text:span text:style-name="T82">目標是</text:span><text:span text:style-name="T218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9" loext:marker-style-name="T219"><text:span text:style-name="T219">Extract-Min</text:span><text:span text:style-name="T220">（</text:span><text:span text:style-name="T179">取出最小值</text:span><text:span text:style-name="T220">）</text:span><text:span text:style-name="T219">= </text:span><text:span text:style-name="T180">O(log n)</text:span></text:p>
            <text:p text:style-name="P47" loext:marker-style-name="T219"><text:span text:style-name="T219">Extract-Max</text:span><text:span text:style-name="T220">（</text:span><text:span text:style-name="T179">取出最大值</text:span><text:span text:style-name="T220">）</text:span><text:span text:style-name="T219">= </text:span><text:span text:style-name="T180">O(log n)</text:span></text:p>
          </table:table-cell>
        </table:table-row>
      </table:table>
      <text:p text:style-name="P10"/>
      <text:h text:style-name="P18" text:outline-level="2" loext:marker-style-name="T20"><text:span text:style-name="T20">7-3 <text:s/>Interval Heap </text:span><text:span text:style-name="T21">的核心設計</text:span></text:h>
      <text:p text:style-name="P6" loext:marker-style-name="T217"><text:span text:style-name="T223">Interval Heap </text:span><text:span text:style-name="T224">的靈感</text:span><text:span text:style-name="T218">：</text:span><text:span text:style-name="T82">把 </text:span><text:span text:style-name="T83">Min Heap </text:span><text:span text:style-name="T82">和 </text:span><text:span text:style-name="T83">Max Heap</text:span><text:span text:style-name="T192">「疊」在同一棵樹上</text:span><text:span text:style-name="T218">。</text:span></text:p>
      <text:p text:style-name="P6" loext:marker-style-name="T217"><text:span text:style-name="T231">具體做法：</text:span><text:span text:style-name="T154">每個節點不再存一個值</text:span><text:span text:style-name="T218">，</text:span><text:span text:style-name="T129">改成存一個「區間」</text:span><text:span text:style-name="T130">[min_val, max_val]</text:span><text:span text:style-name="T218">：</text:span></text:p>
      <text:p text:style-name="P43" loext:marker-style-name="T234"><text:span text:style-name="T234"><text:s text:c="2"/></text:span><text:span text:style-name="T236">普通</text:span><text:span text:style-name="T234"> Heap 節點： <text:s text:c="9"/>Interval Heap 節點：</text:span></text:p>
      <text:p text:style-name="P7" loext:marker-style-name="T234"><text:span text:style-name="T234"><text:s text:c="7"/></text:span><text:span text:style-name="T235">80</text:span><text:span text:style-name="T234"> <text:s text:c="23"/></text:span><text:span text:style-name="T235">[20, 80]</text:span></text:p>
      <text:p text:style-name="P8"><text:s text:c="34"/>左值 <text:s/>右值</text:p>
      <text:p text:style-name="P7" loext:marker-style-name="T234"><text:span text:style-name="T234"><text:s text:c="30"/>（小的） <text:s/>（大的）</text:span><text:span text:style-name="T234"/></text:p>
      <text:p text:style-name="P7"/>
      <text:p text:style-name="P45" loext:marker-style-name="T234"><text:span text:style-name="T234"><text:s text:c="2"/>規則：</text:span><text:span text:style-name="T241">每個節點的 左值 ≤ 右值</text:span><text:span text:style-name="T242"> </text:span><text:span text:style-name="T234">（必須成立）</text:span></text:p>
      <text:p text:style-name="P9"/>
      <text:p text:style-name="P6" loext:marker-style-name="T217"><text:span text:style-name="T225">兩個 </text:span><text:span text:style-name="T226">Heap </text:span><text:span text:style-name="T225">的同時維護</text:span><text:span text:style-name="T218">：</text:span></text:p>
      <text:list text:continue-numbering="true" text:style-name="WWNum14">
        <text:list-item>
          <text:p text:style-name="P30" loext:marker-style-name="T217"><text:span text:style-name="T221">所有節點的</text:span><text:span text:style-name="T115">左</text:span><text:span text:style-name="T221">值（</text:span><text:span text:style-name="T222">min </text:span><text:span text:style-name="T221">端）</text:span><text:span text:style-name="T218">— 自上而下形成一個 </text:span><text:span text:style-name="T116">Min Heap</text:span></text:p>
        </text:list-item>
        <text:list-item>
          <text:p text:style-name="P30" loext:marker-style-name="T217"><text:span text:style-name="T221">所有節點的</text:span><text:span text:style-name="T141">右</text:span><text:span text:style-name="T221">值（</text:span><text:span text:style-name="T222">max </text:span><text:span text:style-name="T221">端</text:span><text:span text:style-name="T218">）— 自上而下形成一個 </text:span><text:span text:style-name="T142">Max Heap</text:span></text:p>
        </text:list-item>
      </text:list>
      <text:p text:style-name="P9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9" loext:marker-style-name="T219"><text:span text:style-name="T219">Interval Heap = </text:span><text:span text:style-name="T117">Min Heap</text:span><text:span text:style-name="T118">（左值）</text:span><text:span text:style-name="T219">+</text:span><text:span text:style-name="T142"> Max Heap</text:span><text:span text:style-name="T143">（右值）</text:span><text:span text:style-name="T243">同時疊在一棵樹上</text:span></text:p>
          </table:table-cell>
        </table:table-row>
      </table:table>
      <text:p text:style-name="P10"/>
      <text:h text:style-name="P18" text:outline-level="2" loext:marker-style-name="T20"><text:span text:style-name="T20">7-4 <text:s/></text:span><text:span text:style-name="T21">整棵樹的結構解析</text:span></text:h>
      <text:p text:style-name="P43" loext:marker-style-name="T234"><text:span text:style-name="T234"><text:s text:c="14"/>[</text:span><text:span text:style-name="T236">10</text:span><text:span text:style-name="T234">, </text:span><text:span text:style-name="T139">100</text:span><text:span text:style-name="T234">] <text:s text:c="9"/>← Root</text:span></text:p>
      <text:p text:style-name="P7" loext:marker-style-name="T234"><text:span text:style-name="T234"><text:s text:c="13"/>/ <text:s text:c="9"/>\</text:span><text:span text:style-name="T234"/></text:p>
      <text:p text:style-name="P45" loext:marker-style-name="T234"><text:soft-page-break/><text:span text:style-name="T234"><text:s text:c="8"/>[</text:span><text:span text:style-name="T236">20</text:span><text:span text:style-name="T234">, </text:span><text:span text:style-name="T139">80</text:span><text:span text:style-name="T234">] <text:s text:c="5"/>[</text:span><text:span text:style-name="T236">30</text:span><text:span text:style-name="T234">, </text:span><text:span text:style-name="T139">90</text:span><text:span text:style-name="T234">]</text:span></text:p>
      <text:p text:style-name="P9"/>
      <text:p text:style-name="P6" loext:marker-style-name="T217"><text:span text:style-name="T218">拆開來看左右兩個 </text:span><text:span text:style-name="T217">Heap</text:span><text:span text:style-name="T218">：</text:span></text:p>
      <text:p text:style-name="P43" loext:marker-style-name="T234"><text:span text:style-name="T234"><text:s text:c="2"/></text:span><text:span text:style-name="T240">左值（min 端）形成 Min Heap</text:span><text:span text:style-name="T234">： <text:s text:c="2"/></text:span><text:span text:style-name="T185">右值（max 端）形成 Max Heap</text:span><text:span text:style-name="T234">：</text:span></text:p>
      <text:p text:style-name="P7"/>
      <text:p text:style-name="P7" loext:marker-style-name="T234"><text:span text:style-name="T234"><text:s text:c="10"/>10 <text:s text:c="30"/>100</text:span><text:span text:style-name="T234"/></text:p>
      <text:p text:style-name="P7" loext:marker-style-name="T234"><text:span text:style-name="T234"><text:s text:c="9"/>/ <text:s/>\ <text:s text:c="28"/>/ <text:s text:c="3"/>\</text:span><text:span text:style-name="T234"/></text:p>
      <text:p text:style-name="P7" loext:marker-style-name="T234"><text:span text:style-name="T234"><text:s text:c="8"/>20 <text:s/>30 <text:s text:c="26"/>80 <text:s text:c="4"/>90</text:span><text:span text:style-name="T234"/></text:p>
      <text:p text:style-name="P7"/>
      <text:p text:style-name="P45" loext:marker-style-name="T234"><text:span text:style-name="T234"><text:s text:c="2"/>驗證 Min Heap：10 ≤ 20 ✓ <text:s/>10 ≤ 30 ✓ <text:s text:c="2"/>驗證 Max Heap：100 ≥ 80 ✓ <text:s/>100 ≥ 90 ✓</text:span><text:span text:style-name="T234"/></text:p>
      <text:p text:style-name="P9"/>
      <text:p text:style-name="P6" loext:marker-style-name="T217"><text:span text:style-name="T218">因此：</text:span><text:span text:style-name="T217"/></text:p>
      <text:list text:continue-numbering="true" text:style-name="WWNum14">
        <text:list-item>
          <text:p text:style-name="P30" loext:marker-style-name="T217"><text:span text:style-name="T222">Root </text:span><text:span text:style-name="T221">的</text:span><text:span text:style-name="T115">左</text:span><text:span text:style-name="T221">值</text:span><text:span text:style-name="T218"> </text:span><text:span text:style-name="T217">= </text:span><text:span text:style-name="T119">Min</text:span><text:span text:style-name="T217"> Heap </text:span><text:span text:style-name="T218">的 </text:span><text:span text:style-name="T217">Root = </text:span><text:span text:style-name="T244">全域最小值</text:span><text:span text:style-name="T218"> </text:span><text:span text:style-name="T217">= 10 <text:s/>→</text:span><text:span text:style-name="T167"> <text:s/>Find-Min = O(1)</text:span></text:p>
        </text:list-item>
        <text:list-item>
          <text:p text:style-name="P30" loext:marker-style-name="T217"><text:span text:style-name="T222">Root </text:span><text:span text:style-name="T221">的</text:span><text:span text:style-name="T141">右</text:span><text:span text:style-name="T221">值</text:span><text:span text:style-name="T218"> </text:span><text:span text:style-name="T217">= </text:span><text:span text:style-name="T144">Max</text:span><text:span text:style-name="T217"> Heap </text:span><text:span text:style-name="T218">的 </text:span><text:span text:style-name="T217">Root = </text:span><text:span text:style-name="T245">全域最大值</text:span><text:span text:style-name="T218"> </text:span><text:span text:style-name="T217">= 100 <text:s/>→ </text:span><text:span text:style-name="T167"><text:s/>Find-Max = O(1)</text:span></text:p>
        </text:list-item>
      </text:list>
      <text:p text:style-name="P9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" loext:marker-style-name="T219"><text:span text:style-name="T219">🎯 Interval Heap </text:span><text:span text:style-name="T220">的核心價值</text:span></text:p>
            <text:p text:style-name="P9" loext:marker-style-name="T229"><text:span text:style-name="T131">Root </text:span><text:span text:style-name="T132">節點</text:span><text:span text:style-name="T179">同時持有全域最小值（左值）和全域最大值（右值）</text:span><text:span text:style-name="T230">，</text:span></text:p>
            <text:p text:style-name="P47" loext:marker-style-name="T229"><text:span text:style-name="T227">無論取哪一端</text:span><text:span text:style-name="T230">，</text:span><text:span text:style-name="T82">都能 </text:span><text:span text:style-name="T83">O(1) </text:span><text:span text:style-name="T82">找到、</text:span><text:span text:style-name="T169">O(log n) </text:span><text:span text:style-name="T170">取出</text:span><text:span text:style-name="T82">。</text:span></text:p>
          </table:table-cell>
        </table:table-row>
      </table:table>
      <text:p text:style-name="P10"/>
      <text:h text:style-name="P17" text:outline-level="2" loext:marker-style-name="T17"><text:span text:style-name="T18">7-4.5 <text:s/></text:span><text:span text:style-name="T156">Find 找到 vs. Extract 取出</text:span><text:span text:style-name="T18">：</text:span><text:span text:style-name="T195">為何一個 O(1)、一個 O(log n)</text:span><text:span text:style-name="T18">？</text:span></text:h>
      <text:p text:style-name="P34" loext:marker-style-name="T246"><text:span text:style-name="T247">這是很多人第一次接觸 Heap 時最容易混淆的地方。關鍵在於：</text:span><text:span text:style-name="T107">「找到（Find/Peek）」和「取出（Extract/Delete）」是完全不同的兩件事。</text:span></text:p>
      <text:p text:style-name="P10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3" loext:marker-style-name="T5"><text:span text:style-name="T14">先用普通 Max Heap 建立直覺</text:span><text:span text:style-name="T5"/></text:p>
          </table:table-cell>
        </table:table-row>
        <table:table-row table:style-name="表格30.1">
          <table:table-cell table:style-name="表格30.A1" office:value-type="string">
            <text:p text:style-name="P3"/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11"/>100 <text:s text:c="2"/>← Root = 全域最大值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10"/>/ <text:s text:c="2"/>\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8"/>90 <text:s text:c="3"/>80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7"/>/ \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5"/>70 <text:s/>60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/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Find-Max（找最大值）= O(1)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2"/>→ 直接讀 Root，什麼都不用動。</text:span><text:span text:style-name="T42"/></text:p>
          </table:table-cell>
        </table:table-row>
        <table:table-row table:style-name="表格30.1">
          <table:table-cell table:style-name="表格30.A1" office:value-type="string">
            <text:p text:style-name="P3"/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Extract-Max（取出最大值）= O(log n)</text:span><text:span text:style-name="T42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3" loext:marker-style-name="T42"><text:span text:style-name="T49"><text:s text:c="2"/>→ </text:span><text:span text:style-name="T181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4"/>1. </text:span><text:span text:style-name="T249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3" loext:marker-style-name="T42"><text:span text:style-name="T49"><text:s text:c="4"/>2. </text:span><text:span text:style-name="T147">Heap Property（父 ≥ 子）不能違反</text:span></text:p>
          </table:table-cell>
        </table:table-row>
      </table:table>
      <text:p text:style-name="P10"/>
      <text:p text:style-name="P34" loext:marker-style-name="T246"><text:span text:style-name="T91">「取出」的代價遠比「找到」高，是因為</text:span><text:span text:style-name="T198">刪除 Root 後必須完整修復整棵樹的結構。</text:span><text:span text:style-name="T247">流程如下：</text:span></text:p>
      <text:p text:style-name="P10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3" loext:marker-style-name="T42"><text:span text:style-name="T49">Extract-Max 完整流程（以上面的 Max Heap 為例）：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Step 1：取出 Root = 10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Step 2：把最後元素（葉節點最右端）60 搬到 Root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9"/>60 <text:s text:c="2"/>← 60 補位後，Heap Property 壞掉了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7"/>90 <text:s/>8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6"/>/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5"/>7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Step 3：60 &lt; 90，違反 Max Heap → 與較大子節點 90 交換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9"/>9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7"/>60 <text:s/>8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6"/>/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5"/>7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Step 4：60 &lt; 70，仍違反 → 再往下交換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9"/>90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8"/>/ <text:s/>\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7"/>70 <text:s/>80</text:span><text:span text:style-name="T42"/></text:p>
          </table:table-cell>
        </table:table-row>
        <text:soft-page-break/>
        <table:table-row table:style-name="表格31.1">
          <table:table-cell table:style-name="表格31.A1" office:value-type="string">
            <text:p text:style-name="P3" loext:marker-style-name="T42"><text:span text:style-name="T49"><text:s text:c="6"/>/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<text:s text:c="5"/>60 <text:s text:c="2"/>← 60 最終落到葉節點，停止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/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49">這個「一路往下修正」的過程稱為 Heapify Down（向下沉）。</text:span><text:span text:style-name="T42"/></text:p>
          </table:table-cell>
        </table:table-row>
        <table:table-row table:style-name="表格31.1">
          <table:table-cell table:style-name="表格31.A1" office:value-type="string">
            <text:p text:style-name="P3" loext:marker-style-name="T42"><text:span text:style-name="T149">最壞情況需走完整棵樹的高度 h = log₂n</text:span><text:span text:style-name="T49">，因此 </text:span><text:span text:style-name="T199">O(log n)</text:span><text:span text:style-name="T49">。</text:span></text:p>
          </table:table-cell>
        </table:table-row>
      </table:table>
      <text:p text:style-name="P10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3" loext:marker-style-name="T5"><text:span text:style-name="T14">直覺比喻：</text:span><text:span text:style-name="T5"/></text:p>
          </table:table-cell>
        </table:table-row>
        <table:table-row table:style-name="表格32.1">
          <table:table-cell table:style-name="表格32.A1" office:value-type="string">
            <text:p text:style-name="P3"/>
          </table:table-cell>
        </table:table-row>
        <table:table-row table:style-name="表格32.1">
          <table:table-cell table:style-name="表格32.A1" office:value-type="string">
            <text:p text:style-name="P3" loext:marker-style-name="T42"><text:span text:style-name="T49"><text:s text:c="2"/>Find <text:s text:c="2"/>= 看書架最上面那本書 → O(1)，就在眼前，看一眼即可。</text:span><text:span text:style-name="T42"/></text:p>
          </table:table-cell>
        </table:table-row>
        <table:table-row table:style-name="表格32.1">
          <table:table-cell table:style-name="表格32.A1" office:value-type="string">
            <text:p text:style-name="P3" loext:marker-style-name="T42"><text:span text:style-name="T49"><text:s text:c="2"/></text:span><text:span text:style-name="T50">Extract</text:span><text:span text:style-name="T49"> = </text:span><text:span text:style-name="T160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3" loext:marker-style-name="T42"><text:span text:style-name="T49"><text:s text:c="11"/></text:span><text:span text:style-name="T181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3" loext:marker-style-name="T42"><text:span text:style-name="T49"><text:s text:c="12"/></text:span><text:span text:style-name="T85">這個「整理」的工作量才是 O(log n) 的真正來源。</text:span></text:p>
          </table:table-cell>
        </table:table-row>
      </table:table>
      <text:p text:style-name="P10"/>
      <text:h text:style-name="P17" text:outline-level="2" loext:marker-style-name="T17"><text:span text:style-name="T18">7-4.6 <text:s/>Interval Heap 的 Extract-Min 與 Extract-Max 完整示範</text:span><text:span text:style-name="T17"/></text:h>
      <text:p text:style-name="P34" loext:marker-style-name="T246"><text:span text:style-name="T248">Interval Heap 的 Extract 操作，本質上就是普通 Heap 的 Heapify Down</text:span><text:span text:style-name="T247">，只是</text:span><text:span text:style-name="T171">同時維護 Min 端和 Max 端兩條性質</text:span><text:span text:style-name="T247">。以下用同一棵初始樹，分別展示兩種操作。</text:span></text:p>
      <text:p text:style-name="P10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3" loext:marker-style-name="T5"><text:span text:style-name="T14">初始 Interval Heap：</text:span><text:span text:style-name="T5"/></text:p>
          </table:table-cell>
        </table:table-row>
        <table:table-row table:style-name="表格33.1">
          <table:table-cell table:style-name="表格33.A1" office:value-type="string">
            <text:p text:style-name="P3"/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<text:s text:c="13"/>[10, 100] <text:s text:c="6"/>← Root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<text:s text:c="12"/>/ <text:s text:c="9"/>\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<text:s text:c="7"/>[20, 80] <text:s text:c="5"/>[30, 90]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/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左值（min 端）形成 Min Heap： <text:s/>10 ≤ 20，10 ≤ 30 ✓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右值（max 端）形成 Max Heap： <text:s/>100 ≥ 80，100 ≥ 90 ✓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/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全域最小值 = Root 左值 = 10</text:span><text:span text:style-name="T42"/></text:p>
          </table:table-cell>
        </table:table-row>
        <table:table-row table:style-name="表格33.1">
          <table:table-cell table:style-name="表格33.A1" office:value-type="string">
            <text:p text:style-name="P3" loext:marker-style-name="T42"><text:span text:style-name="T49">全域最大值 = Root 右值 = 100</text:span><text:span text:style-name="T42"/></text:p>
          </table:table-cell>
        </table:table-row>
      </table:table>
      <text:p text:style-name="P10"/>
      <text:h text:style-name="P17" text:outline-level="2" loext:marker-style-name="T17"><text:span text:style-name="T18"><text:s text:c="2"/>一、Extract-Min（</text:span><text:span text:style-name="T19">取出最小值 10</text:span><text:span text:style-name="T18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3" loext:marker-style-name="T42"><text:span text:style-name="T49">Step 1：</text:span><text:span text:style-name="T252">取出 Root 左值（最小值）= 10</text:span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3" loext:marker-style-name="T42"><text:span text:style-name="T49"><text:s text:c="8"/>Root 左側空洞，需要補位。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[ ?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/ <text:s text:c="7"/>\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6"/>[20, 80] <text:s text:c="3"/>[30, 9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Step 2：補位規則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把最後節點（[30, 90]）整體移除，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取其 min 端（30）補到 Root 的左值位置。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（補 min 端修的是 Min Heap；補 max 端修的是 Max Heap）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[30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/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6"/>[20, 8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Step 3：檢查 Min Heap 性質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Root min = 30，Child min = 20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</text:span><text:span text:style-name="T113">30 &gt; 20 → 違反 Min Heap（父 ≤ 子）</text:span><text:span text:style-name="T49">→ </text:span><text:span text:style-name="T88">交換 min 端</text:span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Step 4：Heapify Down（min 端下沉）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[20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/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6"/>[30, 8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8"/>20 ≤ 30 → 合法，停止。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最終結果：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[20, 10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<text:s text:c="11"/>/</text:span><text:span text:style-name="T42"/></text:p>
          </table:table-cell>
        </table:table-row>
        <text:soft-page-break/>
        <table:table-row table:style-name="表格34.1">
          <table:table-cell table:style-name="表格34.A1" office:value-type="string">
            <text:p text:style-name="P3" loext:marker-style-name="T42"><text:span text:style-name="T49"><text:s text:c="6"/>[30, 80]</text:span><text:span text:style-name="T42"/></text:p>
          </table:table-cell>
        </table:table-row>
        <table:table-row table:style-name="表格34.1">
          <table:table-cell table:style-name="表格34.A1" office:value-type="string">
            <text:p text:style-name="P3"/>
          </table:table-cell>
        </table:table-row>
        <table:table-row table:style-name="表格34.1">
          <table:table-cell table:style-name="表格34.A1" office:value-type="string">
            <text:p text:style-name="P3" loext:marker-style-name="T42"><text:span text:style-name="T49">成功取出最小值 10，</text:span><text:span text:style-name="T181">Min Heap 與 Max Heap 性質皆完整恢復</text:span><text:span text:style-name="T49">。</text:span></text:p>
          </table:table-cell>
        </table:table-row>
      </table:table>
      <text:p text:style-name="P10"/>
      <text:h text:style-name="P17" text:outline-level="2" loext:marker-style-name="T17"><text:span text:style-name="T18"><text:s text:c="2"/>二、Extract-Max（</text:span><text:span text:style-name="T19">取出最大值 100</text:span><text:span text:style-name="T18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3" loext:marker-style-name="T42"><text:span text:style-name="T49">使用同一棵初始樹：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3"/>[10, 10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2"/>/ <text:s text:c="9"/>\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7"/>[20, 80] <text:s text:c="5"/>[3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Step 1：</text:span><text:span text:style-name="T252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8"/>Root 右側空洞，需要補位。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[10, <text:s/>? 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/ <text:s text:c="7"/>\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6"/>[20, 80] <text:s text:c="3"/>[3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Step 2：補位規則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8"/>把最後節點（[30, 90]）整體移除，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8"/>取其 max 端（90）補到 Root 的右值位置。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[1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/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6"/>[20, 8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Step 3：檢查 Max Heap 性質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8"/>Root max = 90，Child max = 80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8"/>90 ≥ 80 → 符合 Max Heap → 無需交換，停止。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ext:soft-page-break/>
        <table:table-row table:style-name="表格35.1">
          <table:table-cell table:style-name="表格35.A1" office:value-type="string">
            <text:p text:style-name="P3" loext:marker-style-name="T42"><text:span text:style-name="T49">最終結果：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[10, 9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11"/>/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<text:s text:c="6"/>[20, 80]</text:span><text:span text:style-name="T42"/></text:p>
          </table:table-cell>
        </table:table-row>
        <table:table-row table:style-name="表格35.1">
          <table:table-cell table:style-name="表格35.A1" office:value-type="string">
            <text:p text:style-name="P3"/>
          </table:table-cell>
        </table:table-row>
        <table:table-row table:style-name="表格35.1">
          <table:table-cell table:style-name="表格35.A1" office:value-type="string">
            <text:p text:style-name="P3" loext:marker-style-name="T42"><text:span text:style-name="T49">成功取出最大值 100，</text:span><text:span text:style-name="T181">結構完整</text:span><text:span text:style-name="T49">。</text:span></text:p>
          </table:table-cell>
        </table:table-row>
      </table:table>
      <text:p text:style-name="P10"/>
      <text:h text:style-name="P17" text:outline-level="2" loext:marker-style-name="T17"><text:span text:style-name="T18"><text:s text:c="2"/>三、Extract-Max 的下沉範例（需多次 Heapify）</text:span><text:span text:style-name="T17"/></text:h>
      <text:p text:style-name="P34" loext:marker-style-name="T246"><text:span text:style-name="T247">上例的 Max Heap 恰好不需要下沉。以下補充一個「確實需要多次下沉」的案例，更能體現 O(log n) 的代價：</text:span><text:span text:style-name="T246"/></text:p>
      <text:p text:style-name="P10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3" loext:marker-style-name="T42"><text:span text:style-name="T49">初始 Interval Heap（5 個節點）：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4"/>[10, 10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[20, 9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/ <text:s text:c="6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3"/>[40, 85] <text:s/>[5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Step 1：取出 Root max = 100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Step 2：最後節點 [50, 70] 移除，取其 max 端 70 補到 Root。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4"/>[1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[20, 9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3"/>[40, 8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Step 3：Root max = 70，子節點 max：左=95，右=90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較大子節點 max = 95 &gt; 70 → 違反 Max Heap → 70 與 95 交換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ext:soft-page-break/>
        <table:table-row table:style-name="表格36.1">
          <table:table-cell table:style-name="表格36.A1" office:value-type="string">
            <text:p text:style-name="P3" loext:marker-style-name="T42"><text:span text:style-name="T49"><text:s text:c="14"/>[10, 9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[20, 70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3"/>[40, 8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Step 4：[20, 70] 的 max = 70，子節點 max：左=85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85 &gt; 70 → 仍違反 → 70 與 85 交換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4"/>[10, 9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[20, 8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3"/>[4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Step 5：[40, 70] 已是葉節點 → 停止。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最終結果：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4"/>[10, 95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13"/>/ <text:s text:c="9"/>\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[20, 85] <text:s text:c="5"/>[30, 9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8"/>/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<text:s text:c="3"/>[40, 70]</text:span><text:span text:style-name="T42"/></text:p>
          </table:table-cell>
        </table:table-row>
        <table:table-row table:style-name="表格36.1">
          <table:table-cell table:style-name="表格36.A1" office:value-type="string">
            <text:p text:style-name="P3"/>
          </table:table-cell>
        </table:table-row>
        <table:table-row table:style-name="表格36.1">
          <table:table-cell table:style-name="表格36.A1" office:value-type="string">
            <text:p text:style-name="P3" loext:marker-style-name="T42"><text:span text:style-name="T49">全域最大值已更新為 95。</text:span><text:span text:style-name="T42"/></text:p>
          </table:table-cell>
        </table:table-row>
      </table:table>
      <text:p text:style-name="P10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3" loext:marker-style-name="T5"><text:span text:style-name="T14">公職考試必記：Find vs. Extract 時間一覽</text:span><text:span text:style-name="T5"/></text:p>
          </table:table-cell>
        </table:table-row>
        <table:table-row table:style-name="表格37.1">
          <table:table-cell table:style-name="表格37.A1" office:value-type="string">
            <text:p text:style-name="P3"/>
          </table:table-cell>
        </table:table-row>
        <table:table-row table:style-name="表格37.1">
          <table:table-cell table:style-name="表格37.A1" office:value-type="string">
            <text:p text:style-name="P3" loext:marker-style-name="T42"><text:span text:style-name="T49"><text:s text:c="2"/>操作 <text:s text:c="14"/>Interval Heap <text:s text:c="3"/>普通 Max Heap <text:s text:c="3"/>普通 Min Heap</text:span><text:span text:style-name="T42"/></text:p>
          </table:table-cell>
        </table:table-row>
        <table:table-row table:style-name="表格37.1">
          <table:table-cell table:style-name="表格37.A1" office:value-type="string">
            <text:p text:style-name="P3" loext:marker-style-name="T42"><text:span text:style-name="T49"><text:s text:c="2"/>Find-Min（找最小） O(1) <text:s/>★ <text:s text:c="9"/>O(n) <text:s text:c="12"/>O(1)</text:span><text:span text:style-name="T42"/></text:p>
          </table:table-cell>
        </table:table-row>
        <text:soft-page-break/>
        <table:table-row table:style-name="表格37.1">
          <table:table-cell table:style-name="表格37.A1" office:value-type="string">
            <text:p text:style-name="P3" loext:marker-style-name="T42"><text:span text:style-name="T49"><text:s text:c="2"/>Find-Max（找最大） O(1) <text:s/>★ <text:s text:c="9"/>O(1) <text:s text:c="12"/>O(n)</text:span><text:span text:style-name="T42"/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11"><text:s text:c="2"/>Extract-Min <text:s text:c="7"/>O(log n) <text:s text:c="9"/></text:span><text:span text:style-name="T250">O(n) </text:span><text:span text:style-name="T211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11"><text:span text:style-name="T211"><text:s text:c="2"/>Extract-Max <text:s text:c="7"/>O(log n) <text:s text:c="9"/>O(log n) <text:s text:c="8"/></text:span><text:span text:style-name="T251">O(n)</text:span></text:p>
          </table:table-cell>
        </table:table-row>
        <table:table-row table:style-name="表格37.1">
          <table:table-cell table:style-name="表格37.A1" office:value-type="string">
            <text:p text:style-name="P3"/>
          </table:table-cell>
        </table:table-row>
        <table:table-row table:style-name="表格37.1">
          <table:table-cell table:style-name="表格37.A1" office:value-type="string">
            <text:p text:style-name="P3" loext:marker-style-name="T42"><text:span text:style-name="T85">Interval Heap 的兩個 Extract 都是 O(log n)</text:span><text:span text:style-name="T49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3" loext:marker-style-name="T42"><text:span text:style-name="T49">Find 快是因為答案就在 Root；</text:span><text:span text:style-name="T42"/></text:p>
          </table:table-cell>
        </table:table-row>
        <table:table-row table:style-name="表格37.1">
          <table:table-cell table:style-name="表格37.A1" office:value-type="string">
            <text:p text:style-name="P3" loext:marker-style-name="T42"><text:span text:style-name="T202">Extract 要 O(log n) </text:span><text:span text:style-name="T49">是因為</text:span><text:span text:style-name="T199">刪除後必須 Heapify Down 修復結構</text:span><text:span text:style-name="T49">。</text:span></text:p>
          </table:table-cell>
        </table:table-row>
      </table:table>
      <text:p text:style-name="P10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3" loext:marker-style-name="T42"><text:span text:style-name="T49">⚠️ <text:s/>常見混淆整理：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3"/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「Root 節點同時持有全域最小與最大值，所以 O(1) 找到。」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→ 正確。Find = 讀一個值，完全不修改樹，當然 O(1)。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3"/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「Find 都 O(1) 了，Extract 怎麼還要 O(log n)？」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→ 因為</text:span><text:span text:style-name="T150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<text:s text:c="2"/></text:span><text:span text:style-name="T99">刪除後最後元素補位</text:span><text:span text:style-name="T49">，再 Heapify Down 重建性質，</text:span></text:p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<text:s text:c="2"/>最壞走 log n 層 → O(log n)。</text:span><text:span text:style-name="T42"/></text:p>
          </table:table-cell>
        </table:table-row>
        <table:table-row table:style-name="表格38.1">
          <table:table-cell table:style-name="表格38.A1" office:value-type="string">
            <text:p text:style-name="P3"/>
          </table:table-cell>
        </table:table-row>
        <table:table-row table:style-name="表格38.1">
          <table:table-cell table:style-name="表格38.A1" office:value-type="string">
            <text:p text:style-name="P3" loext:marker-style-name="T42"><text:span text:style-name="T49">記法：Find = 看，不動樹 → O(1)。</text:span><text:span text:style-name="T181">Extract = 拿走，要整理 → O(log n)</text:span><text:span text:style-name="T49">。</text:span></text:p>
          </table:table-cell>
        </table:table-row>
      </table:table>
      <text:p text:style-name="P10"/>
      <text:p text:style-name="P10"/>
      <text:h text:style-name="P18" text:outline-level="2" loext:marker-style-name="T20"><text:span text:style-name="T20">7-5 <text:s/></text:span><text:span text:style-name="T21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253"><text:span text:style-name="T254">操作</text:span><text:span text:style-name="T253"/></text:p>
          </table:table-cell>
          <table:table-cell table:style-name="表格39.A1" office:value-type="string">
            <text:p text:style-name="Standard" loext:marker-style-name="T253"><text:span text:style-name="T253">Interval Heap</text:span><text:span text:style-name="T253"/></text:p>
          </table:table-cell>
          <table:table-cell table:style-name="表格39.A1" office:value-type="string">
            <text:p text:style-name="Standard" loext:marker-style-name="T253"><text:span text:style-name="T254">普通 </text:span><text:span text:style-name="T253">Max Heap</text:span></text:p>
          </table:table-cell>
          <table:table-cell table:style-name="表格39.A1" office:value-type="string">
            <text:p text:style-name="Standard" loext:marker-style-name="T253"><text:span text:style-name="T254">普通 </text:span><text:span text:style-name="T253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32"><text:span text:style-name="T232">Find-Min</text:span><text:span text:style-name="T233">（找最小值）</text:span></text:p>
          </table:table-cell>
          <table:table-cell table:style-name="表格39.A2" office:value-type="string">
            <text:p text:style-name="Standard" loext:marker-style-name="T232"><text:span text:style-name="T232">O(1) ★</text:span><text:span text:style-name="T232"/></text:p>
          </table:table-cell>
          <table:table-cell table:style-name="表格39.A2" office:value-type="string">
            <text:p text:style-name="Standard" loext:marker-style-name="T232"><text:span text:style-name="T232">O(n)</text:span><text:span text:style-name="T232"/></text:p>
          </table:table-cell>
          <table:table-cell table:style-name="表格39.A2" office:value-type="string">
            <text:p text:style-name="Standard" loext:marker-style-name="T232"><text:span text:style-name="T232">O(1)</text:span><text:span text:style-name="T232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32"><text:span text:style-name="T232">Find-Max</text:span><text:span text:style-name="T233">（找最大值）</text:span></text:p>
          </table:table-cell>
          <table:table-cell table:style-name="表格39.A3" office:value-type="string">
            <text:p text:style-name="Standard" loext:marker-style-name="T232"><text:span text:style-name="T232">O(1) ★</text:span><text:span text:style-name="T232"/></text:p>
          </table:table-cell>
          <table:table-cell table:style-name="表格39.A3" office:value-type="string">
            <text:p text:style-name="Standard" loext:marker-style-name="T232"><text:span text:style-name="T232">O(1)</text:span><text:span text:style-name="T232"/></text:p>
          </table:table-cell>
          <table:table-cell table:style-name="表格39.A3" office:value-type="string">
            <text:p text:style-name="Standard" loext:marker-style-name="T232"><text:span text:style-name="T232">O(n)</text:span><text:span text:style-name="T232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232"><text:span text:style-name="T232">Extract-Min</text:span><text:span text:style-name="T233">（取出最小）</text:span></text:p>
          </table:table-cell>
          <table:table-cell table:style-name="表格39.A2" office:value-type="string">
            <text:p text:style-name="P13">O(log n) ★</text:p>
          </table:table-cell>
          <table:table-cell table:style-name="表格39.A2" office:value-type="string">
            <text:p text:style-name="P16">O(n)</text:p>
          </table:table-cell>
          <table:table-cell table:style-name="表格39.A2" office:value-type="string">
            <text:p text:style-name="Standard" loext:marker-style-name="T232"><text:span text:style-name="T232">O(log n)</text:span><text:span text:style-name="T232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232"><text:span text:style-name="T232">Extract-Max</text:span><text:span text:style-name="T233">（取出最大）</text:span></text:p>
          </table:table-cell>
          <table:table-cell table:style-name="表格39.A3" office:value-type="string">
            <text:p text:style-name="P13">O(log n) ★</text:p>
          </table:table-cell>
          <table:table-cell table:style-name="表格39.A3" office:value-type="string">
            <text:p text:style-name="Standard" loext:marker-style-name="T232"><text:span text:style-name="T232">O(log n)</text:span><text:span text:style-name="T232"/></text:p>
          </table:table-cell>
          <table:table-cell table:style-name="表格39.A3" office:value-type="string">
            <text:p text:style-name="P16">O(n)</text:p>
          </table:table-cell>
        </table:table-row>
      </table:table>
      <text:p text:style-name="P6"/>
      <table:table table:name="表格40" table:style-name="表格40">
        <table:table-column table:style-name="表格40.A"/>
        <text:soft-page-break/>
        <table:table-row table:style-name="表格40.1">
          <table:table-cell table:style-name="表格40.A1" office:value-type="string">
            <text:p text:style-name="P9" loext:marker-style-name="T219"><text:span text:style-name="T219">⚠️ <text:s/></text:span><text:span text:style-name="T220">普通 </text:span><text:span text:style-name="T219">Min/Max Heap </text:span><text:span text:style-name="T220">各有盲點：</text:span></text:p>
            <text:p text:style-name="P9" loext:marker-style-name="T229"><text:span text:style-name="T66">普通 </text:span><text:span text:style-name="T67">Max Heap </text:span><text:span text:style-name="T66">找最小值 </text:span><text:span text:style-name="T230">→ </text:span><text:span text:style-name="T222">O(n)</text:span><text:span text:style-name="T221">（要掃整棵樹）</text:span></text:p>
            <text:p text:style-name="P9" loext:marker-style-name="T229"><text:span text:style-name="T76">普通 </text:span><text:span text:style-name="T77">Min Heap </text:span><text:span text:style-name="T76">找最大值 </text:span><text:span text:style-name="T230">→ </text:span><text:span text:style-name="T222">O(n)</text:span><text:span text:style-name="T221">（同理）</text:span></text:p>
            <text:p text:style-name="P47" loext:marker-style-name="T229"><text:span text:style-name="T83">Interval Heap </text:span><text:span text:style-name="T82">解決此問題，兩端操作都達到 </text:span><text:span text:style-name="T83">O(log n)</text:span><text:span text:style-name="T230">，這是其最大優勢。</text:span></text:p>
          </table:table-cell>
        </table:table-row>
      </table:table>
      <text:p text:style-name="P10"/>
      <text:h text:style-name="P18" text:outline-level="2" loext:marker-style-name="T20"><text:span text:style-name="T20">7-6 <text:s/>Insert </text:span><text:span text:style-name="T21">操作示範（插入 </text:span><text:span text:style-name="T20">5</text:span><text:span text:style-name="T21">）</text:span></text:h>
      <text:p text:style-name="P6" loext:marker-style-name="T217"><text:span text:style-name="T218">以下示範將數字 </text:span><text:span text:style-name="T217">5 </text:span><text:span text:style-name="T218">插入含 </text:span><text:span text:style-name="T217">{10, 100}, {20, 80}, {30, 90} </text:span><text:span text:style-name="T218">的 </text:span><text:span text:style-name="T217">Interval Heap</text:span><text:span text:style-name="T218">：</text:span></text:p>
      <text:p text:style-name="P43" loext:marker-style-name="T234"><text:span text:style-name="T234">初始： <text:s text:c="10"/>[10, 100]</text:span><text:span text:style-name="T234"/></text:p>
      <text:p text:style-name="P7" loext:marker-style-name="T234"><text:span text:style-name="T234"><text:s text:c="18"/>/ <text:s text:c="7"/>\</text:span><text:span text:style-name="T234"/></text:p>
      <text:p text:style-name="P7" loext:marker-style-name="T234"><text:span text:style-name="T234"><text:s text:c="13"/>[20, 80] <text:s text:c="2"/>[30, 90]</text:span><text:span text:style-name="T234"/></text:p>
      <text:p text:style-name="P7"/>
      <text:p text:style-name="P7" loext:marker-style-name="T234"><text:span text:style-name="T234">Step 1：</text:span><text:span text:style-name="T235">新葉 [5, 5] </text:span><text:span text:style-name="T234">接在 [20, 80] 左子位置</text:span></text:p>
      <text:p text:style-name="P7" loext:marker-style-name="T234"><text:span text:style-name="T234"><text:s text:c="13"/>[10, 100]</text:span><text:span text:style-name="T234"/></text:p>
      <text:p text:style-name="P7" loext:marker-style-name="T234"><text:span text:style-name="T234"><text:s text:c="14"/>/ <text:s text:c="7"/>\</text:span><text:span text:style-name="T234"/></text:p>
      <text:p text:style-name="P7" loext:marker-style-name="T234"><text:span text:style-name="T234"><text:s text:c="9"/>[20, 80] <text:s text:c="2"/>[30, 90]</text:span><text:span text:style-name="T234"/></text:p>
      <text:p text:style-name="P7" loext:marker-style-name="T234"><text:span text:style-name="T234"><text:s text:c="14"/>/</text:span><text:span text:style-name="T234"/></text:p>
      <text:p text:style-name="P7" loext:marker-style-name="T234"><text:span text:style-name="T234"><text:s text:c="11"/>[5, 5] <text:s text:c="2"/>← </text:span><text:span text:style-name="T74">5 &lt; parent.min(20)</text:span><text:span text:style-name="T234">，</text:span><text:span text:style-name="T186">min 端需上浮</text:span></text:p>
      <text:p text:style-name="P7"/>
      <text:p text:style-name="P7" loext:marker-style-name="T234"><text:span text:style-name="T234">Step 2：</text:span><text:span text:style-name="T139">交換 min 端 → [20,80]→[5,80]</text:span><text:span text:style-name="T234">，</text:span><text:span text:style-name="T186">葉→[20,20]</text:span></text:p>
      <text:p text:style-name="P7" loext:marker-style-name="T234"><text:span text:style-name="T234"><text:s text:c="13"/>[10, 100]</text:span><text:span text:style-name="T234"/></text:p>
      <text:p text:style-name="P7" loext:marker-style-name="T234"><text:span text:style-name="T234"><text:s text:c="14"/>/ <text:s text:c="7"/>\</text:span><text:span text:style-name="T234"/></text:p>
      <text:p text:style-name="P7" loext:marker-style-name="T234"><text:span text:style-name="T234"><text:s text:c="10"/>[5, 80] <text:s text:c="2"/>[30, 90] <text:s text:c="2"/>← </text:span><text:span text:style-name="T74">5 &lt; Root.min(10)</text:span><text:span text:style-name="T234">，</text:span><text:span text:style-name="T186">繼續上浮</text:span></text:p>
      <text:p text:style-name="P7" loext:marker-style-name="T234"><text:span text:style-name="T234"><text:s text:c="14"/>/</text:span><text:span text:style-name="T234"/></text:p>
      <text:p text:style-name="P7" loext:marker-style-name="T234"><text:span text:style-name="T234"><text:s text:c="10"/>[20, 20]</text:span><text:span text:style-name="T234"/></text:p>
      <text:p text:style-name="P7"/>
      <text:p text:style-name="P7" loext:marker-style-name="T234"><text:span text:style-name="T234">Step 3：</text:span><text:span text:style-name="T139">交換 min 端 → Root[10,100]→[5,100]</text:span><text:span text:style-name="T234">，</text:span><text:span text:style-name="T186">[5,80]→[10,80]</text:span></text:p>
      <text:p text:style-name="P7"/>
      <text:p text:style-name="P7" loext:marker-style-name="T234"><text:span text:style-name="T234">最終： <text:s text:c="10"/>[5, 100] <text:s text:c="2"/>← </text:span><text:span text:style-name="T148">全域最小值已更新</text:span></text:p>
      <text:p text:style-name="P7" loext:marker-style-name="T234"><text:span text:style-name="T234"><text:s text:c="18"/>/ <text:s text:c="7"/>\</text:span><text:span text:style-name="T234"/></text:p>
      <text:p text:style-name="P7" loext:marker-style-name="T234"><text:span text:style-name="T234"><text:s text:c="13"/>[10, 80] <text:s text:c="2"/>[30, 90]</text:span><text:span text:style-name="T234"/></text:p>
      <text:p text:style-name="P7" loext:marker-style-name="T234"><text:span text:style-name="T234"><text:s text:c="18"/>/</text:span><text:span text:style-name="T234"/></text:p>
      <text:p text:style-name="P45" loext:marker-style-name="T234"><text:span text:style-name="T234"><text:s text:c="13"/>[20, 20]</text:span><text:span text:style-name="T234"/></text:p>
      <text:p text:style-name="P9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" loext:marker-style-name="T219"><text:span text:style-name="T219">Insert </text:span><text:span text:style-name="T220">規則：</text:span></text:p>
            <text:p text:style-name="P9" loext:marker-style-name="T229"><text:span text:style-name="T230">新值 </text:span><text:span text:style-name="T229">&lt; </text:span><text:span text:style-name="T230">父節點左值（</text:span><text:span text:style-name="T229">min</text:span><text:span text:style-name="T230">）→ 交換左值，繼續往上（</text:span><text:span text:style-name="T229">min </text:span><text:span text:style-name="T230">端上浮）</text:span></text:p>
            <text:p text:style-name="P9" loext:marker-style-name="T229"><text:span text:style-name="T230">新值 </text:span><text:span text:style-name="T229">&gt; </text:span><text:span text:style-name="T230">父節點右值（</text:span><text:span text:style-name="T229">max</text:span><text:span text:style-name="T230">）→ 交換右值，繼續往上（</text:span><text:span text:style-name="T229">max </text:span><text:span text:style-name="T230">端上浮）</text:span></text:p>
            <text:p text:style-name="P12"><text:span text:style-name="T213">新值介於父節點 </text:span><text:span text:style-name="T214">[min, max] </text:span><text:span text:style-name="T213">之間 → 合法，停止</text:span></text:p>
          </table:table-cell>
        </table:table-row>
      </table:table>
      <text:h text:style-name="P2" text:outline-level="1"><text:span text:style-name="T216">八、合併兩個 </text:span><text:span text:style-name="T215">Heap</text:span><text:span text:style-name="T216">（</text:span><text:span text:style-name="T215">Merge Heap</text:span><text:span text:style-name="T216">）【</text:span><text:span text:style-name="T215">111</text:span><text:span text:style-name="T216">地</text:span><text:span text:style-name="T215">Q4</text:span><text:span text:style-name="T216">】</text:span></text:h>
      <text:p text:style-name="P6" loext:marker-style-name="T217"><text:span text:style-name="T218">這一章看起來很多，其實從頭到尾只在回答 </text:span></text:p>
      <table:table table:name="表格M1" table:style-name="表格M1">
        <table:table-column table:style-name="表格M1.A"/>
        <table:table-row table:style-name="表格M1.1">
          <table:table-cell table:style-name="表格M1.A1" office:value-type="string">
            <text:p text:style-name="P47" loext:marker-style-name="T219"><text:span text:style-name="T220">一個問題：如果有兩個 Heap，要怎麼「快速」合併成一個？</text:span></text:p>
          </table:table-cell>
        </table:table-row>
      </table:table>
      <text:p text:style-name="P6" loext:marker-style-name="T217"><text:soft-page-break/><text:span text:style-name="T218">把這句話記在心裡，下面每一段都是為了回答它。</text:span></text:p>
      <text:p text:style-name="P10"/>
      <text:h text:style-name="P18" text:outline-level="2" loext:marker-style-name="T20"><text:span text:style-name="T20">8-1 <text:s/></text:span><text:span text:style-name="T21">先看普通 Binary Heap 怎麼合併（為什麼會慢）</text:span></text:h>
      <text:p text:style-name="P6" loext:marker-style-name="T217"><text:span text:style-name="T218">假設你有兩個 </text:span><text:span text:style-name="T217">Max Heap A</text:span><text:span text:style-name="T218"> 和 </text:span><text:span text:style-name="T217">B</text:span><text:span text:style-name="T218">，想把它們併成一個新的 Max Heap：</text:span></text:p>
      <text:p text:style-name="P43" loext:marker-style-name="T234"><text:span text:style-name="T234"><text:s text:c="3"/>Heap A： <text:s text:c="9"/>Heap B：</text:span><text:span text:style-name="T234"/></text:p>
      <text:p text:style-name="P7" loext:marker-style-name="T234"><text:span text:style-name="T234"><text:s text:c="6"/>90 <text:s text:c="15"/>95</text:span><text:span text:style-name="T234"/></text:p>
      <text:p text:style-name="P7" loext:marker-style-name="T234"><text:span text:style-name="T234"><text:s text:c="5"/>/ <text:s/>\ <text:s text:c="13"/>/ <text:s/>\</text:span><text:span text:style-name="T234"/></text:p>
      <text:p text:style-name="P45" loext:marker-style-name="T234"><text:span text:style-name="T234"><text:s text:c="4"/>70 <text:s text:c="2"/>80 <text:s text:c="10"/>60 <text:s text:c="2"/>50</text:span><text:span text:style-name="T234"/></text:p>
      <text:p text:style-name="P6" loext:marker-style-name="T217"><text:span text:style-name="T219">你的第一個直覺，大概是這樣做：</text:span></text:p>
      <text:p text:style-name="P43" loext:marker-style-name="T234"><text:span text:style-name="T234"><text:s text:c="2"/>Step1 <text:s/>把兩棵全部「倒出來」</text:span><text:span text:style-name="T234"/></text:p>
      <text:p text:style-name="P7" loext:marker-style-name="T234"><text:span text:style-name="T234"><text:s text:c="9"/>90 70 80 95 60 50</text:span><text:span text:style-name="T234"/></text:p>
      <text:p text:style-name="P8"/>
      <text:p text:style-name="P7" loext:marker-style-name="T234"><text:span text:style-name="T234"><text:s text:c="2"/>Step2 <text:s/>重新 Build Heap（Bottom-Up）</text:span><text:span text:style-name="T234"/></text:p>
      <text:p text:style-name="P7" loext:marker-style-name="T234"><text:span text:style-name="T234"><text:s text:c="16"/>95</text:span><text:span text:style-name="T234"/></text:p>
      <text:p text:style-name="P7" loext:marker-style-name="T234"><text:span text:style-name="T234"><text:s text:c="15"/>/ <text:s/>\</text:span><text:span text:style-name="T234"/></text:p>
      <text:p text:style-name="P7" loext:marker-style-name="T234"><text:span text:style-name="T234"><text:s text:c="13"/>90 <text:s text:c="3"/>80</text:span><text:span text:style-name="T234"/></text:p>
      <text:p text:style-name="P7" loext:marker-style-name="T234"><text:span text:style-name="T234"><text:s text:c="12"/>/ <text:s/>\ <text:s text:c="2"/>/</text:span><text:span text:style-name="T234"/></text:p>
      <text:p text:style-name="P45" loext:marker-style-name="T234"><text:span text:style-name="T234"><text:s text:c="11"/>70 <text:s/>60 50</text:span><text:span text:style-name="T234"/></text:p>
      <text:p text:style-name="P6" loext:marker-style-name="T217"><text:span text:style-name="T218">這就是普通 </text:span><text:span text:style-name="T83">Binary Heap</text:span><text:span text:style-name="T218"> 的作法：全部元素重新整理一次。時間是 </text:span><text:span text:style-name="T193">O(n+m)</text:span><text:span text:style-name="T218">（n、m 是兩個 Heap 的大小）。</text:span></text:p>
      <table:table table:name="表格M2" table:style-name="表格M2">
        <table:table-column table:style-name="表格M2.A"/>
        <table:table-row table:style-name="表格M2.1">
          <table:table-cell table:style-name="表格M2.A1" office:value-type="string">
            <text:p text:style-name="P9" loext:marker-style-name="T219"><text:span text:style-name="T219">❓ </text:span><text:span text:style-name="T222">單次來看 O(n+m) 其實還好，問題出在哪？</text:span></text:p>
            <text:p text:style-name="P9" loext:marker-style-name="T229"><text:span text:style-name="T230">麻煩的是有些系統「一天要合併幾十萬次」，例如：</text:span></text:p>
            <text:p text:style-name="P9" loext:marker-style-name="T229"><text:span text:style-name="T230">• 事件驅動模擬（Event-driven Simulation）</text:span></text:p>
            <text:p text:style-name="P9" loext:marker-style-name="T229"><text:span text:style-name="T230">• 作業系統排程器（Scheduler）</text:span></text:p>
            <text:p text:style-name="P47" loext:marker-style-name="T229"><text:span text:style-name="T230">• 分散式工作佇列（Distributed Job Queue）</text:span></text:p>
          </table:table-cell>
        </table:table-row>
      </table:table>
      <text:p text:style-name="P6" loext:marker-style-name="T217"><text:span text:style-name="T218">想像一直 Merge：A+B→C，C+D→E，E+F→… 一路併下去。每次都 </text:span><text:span text:style-name="T193">O(n+m)</text:span><text:span text:style-name="T218">，就太慢了。於是有人問：能不能「不要每次都重建」？</text:span></text:p>
      <text:p text:style-name="P10"/>
      <text:h text:style-name="P18" text:outline-level="2" loext:marker-style-name="T20"><text:span text:style-name="T20">8-2 <text:s/></text:span><text:span text:style-name="T21">Leftist Heap 的核心想法：Merge 只走右邊</text:span></text:h>
      <text:p text:style-name="P6" loext:marker-style-name="T217"><text:span text:style-name="T218">為了讓 Merge 變快，有人發明了 </text:span><text:span text:style-name="T83">Leftist Heap</text:span><text:span text:style-name="T218">（</text:span><text:span text:style-name="T224">左偏堆</text:span><text:span text:style-name="T218">）。先講清楚一件最容易誤會的事：</text:span></text:p>
      <table:table table:name="表格M3" table:style-name="表格M3">
        <table:table-column table:style-name="表格M3.A"/>
        <table:table-row table:style-name="表格M3.1">
          <table:table-cell table:style-name="表格M3.A1" office:value-type="string">
            <text:p text:style-name="P9" loext:marker-style-name="T219"><text:span text:style-name="T179">Leftist Heap 唯一的目的，就是「讓 Merge 很快」</text:span><text:span text:style-name="T220">。</text:span></text:p>
            <text:p text:style-name="P47" loext:marker-style-name="T229"><text:span text:style-name="T230">不是 Insert 更快、不是 Delete 更快——就只是 </text:span><text:span text:style-name="T221">Merge 很快</text:span><text:span text:style-name="T230">。</text:span></text:p>
          </table:table-cell>
        </table:table-row>
      </table:table>
      <text:p text:style-name="P6" loext:marker-style-name="T217"><text:span text:style-name="T219">那它怎麼做到的？整章最重要的一句話：</text:span></text:p>
      <table:table table:name="表格M4" table:style-name="表格M4">
        <table:table-column table:style-name="表格M4.A"/>
        <table:table-row table:style-name="表格M4.1">
          <table:table-cell table:style-name="表格M4.A1" office:value-type="string">
            <text:p text:style-name="P47" loext:marker-style-name="T219"><text:span text:style-name="T169">Merge</text:span><text:span text:style-name="T170"> 只走右邊：Root → 右 → 右 → 右</text:span></text:p>
          </table:table-cell>
        </table:table-row>
      </table:table>
      <text:p text:style-name="P6" loext:marker-style-name="T217"><text:span text:style-name="T218">不是整棵樹、不是 DFS、也不是 BFS。Merge 只會沿著「最右邊那條路」往下走。例如：</text:span></text:p>
      <text:p text:style-name="P43" loext:marker-style-name="T234"><text:span text:style-name="T234"><text:s text:c="8"/>3</text:span><text:span text:style-name="T234"/></text:p>
      <text:p text:style-name="P7" loext:marker-style-name="T234"><text:span text:style-name="T234"><text:s text:c="7"/>/ \</text:span><text:span text:style-name="T234"/></text:p>
      <text:p text:style-name="P7" loext:marker-style-name="T234"><text:soft-page-break/><text:span text:style-name="T234"><text:s text:c="6"/>5 <text:s text:c="2"/>8 <text:s text:c="7"/></text:span><text:span text:style-name="T172">Merge 只會碰到：</text:span></text:p>
      <text:p text:style-name="P7" loext:marker-style-name="T234"><text:span text:style-name="T234"><text:s text:c="11"/>\ <text:s text:c="6"/></text:span><text:span text:style-name="T172">3 → 8 → 9 → 12</text:span></text:p>
      <text:p text:style-name="P7" loext:marker-style-name="T234"><text:span text:style-name="T234"><text:s text:c="12"/>9</text:span><text:span text:style-name="T234"/></text:p>
      <text:p text:style-name="P7" loext:marker-style-name="T234"><text:span text:style-name="T234"><text:s text:c="13"/>\ <text:s text:c="4"/></text:span><text:span text:style-name="T109">左邊的 5 完全不動！</text:span></text:p>
      <text:p text:style-name="P45" loext:marker-style-name="T234"><text:span text:style-name="T234"><text:s text:c="13"/>12</text:span><text:span text:style-name="T234"/></text:p>
      <text:p text:style-name="P6" loext:marker-style-name="T217"><text:span text:style-name="T218">既然只走右邊，那</text:span><text:span text:style-name="T82">「右邊有多長」就決定了 Merge 有多快</text:span><text:span text:style-name="T218">。可是</text:span><text:span text:style-name="T122">如果右邊很長呢？</text:span></text:p>
      <text:p text:style-name="P43" loext:marker-style-name="T234"><text:span text:style-name="T234"><text:s text:c="3"/>3</text:span><text:span text:style-name="T234"/></text:p>
      <text:p text:style-name="P7" loext:marker-style-name="T234"><text:span text:style-name="T234"><text:s text:c="4"/>\</text:span><text:span text:style-name="T234"/></text:p>
      <text:p text:style-name="P7" loext:marker-style-name="T234"><text:span text:style-name="T234"><text:s text:c="5"/>4</text:span><text:span text:style-name="T234"/></text:p>
      <text:p text:style-name="P7" loext:marker-style-name="T234"><text:span text:style-name="T234"><text:s text:c="6"/>\</text:span><text:span text:style-name="T234"/></text:p>
      <text:p text:style-name="P7" loext:marker-style-name="T234"><text:span text:style-name="T234"><text:s text:c="7"/>5 <text:s text:c="5"/>右側路徑 = 5 步</text:span><text:span text:style-name="T234"/></text:p>
      <text:p text:style-name="P7" loext:marker-style-name="T234"><text:span text:style-name="T234"><text:s text:c="8"/>\ <text:s text:c="4"/>→ Merge 退化成 O(n) <text:s/>✗</text:span><text:span text:style-name="T234"/></text:p>
      <text:p text:style-name="P7" loext:marker-style-name="T234"><text:span text:style-name="T234"><text:s text:c="9"/>6</text:span><text:span text:style-name="T234"/></text:p>
      <text:p text:style-name="P7" loext:marker-style-name="T234"><text:span text:style-name="T234"><text:s text:c="10"/>\</text:span><text:span text:style-name="T234"/></text:p>
      <text:p text:style-name="P45" loext:marker-style-name="T234"><text:span text:style-name="T234"><text:s text:c="11"/>7</text:span><text:span text:style-name="T234"/></text:p>
      <text:p text:style-name="P6" loext:marker-style-name="T217"><text:span text:style-name="T218">所以 </text:span><text:span text:style-name="T192">Leftist Heap 的招數就是一句話：</text:span></text:p>
      <table:table table:name="表格M5" table:style-name="表格M5">
        <table:table-column table:style-name="表格M5.A"/>
        <table:table-row table:style-name="表格M5.1">
          <table:table-cell table:style-name="表格M5.A1" office:value-type="string">
            <text:p text:style-name="P14">故意讓「右邊」永遠很短。</text:p>
          </table:table-cell>
        </table:table-row>
      </table:table>
      <text:p text:style-name="P15"/>
      <text:h text:style-name="P18" text:outline-level="2" loext:marker-style-name="T20"><text:span text:style-name="T20">8-3 <text:s/></text:span><text:span text:style-name="T21">為什麼叫</text:span><text:span text:style-name="T22"> Leftist（左偏）</text:span><text:span text:style-name="T21">？</text:span></text:h>
      <text:p text:style-name="P6" loext:marker-style-name="T217"><text:span text:style-name="T218">因為</text:span><text:span text:style-name="T179">它「故意」長得左長右短：左邊可以很長，右邊一定很短</text:span><text:span text:style-name="T218">。</text:span></text:p>
      <text:p text:style-name="P43" loext:marker-style-name="T234"><text:span text:style-name="T234"><text:s text:c="3"/>左偏（Leftist，正確） <text:s text:c="7"/>右傾（不好）</text:span><text:span text:style-name="T234"/></text:p>
      <text:p text:style-name="P7" loext:marker-style-name="T234"><text:span text:style-name="T234"><text:s text:c="10"/>3 <text:s text:c="23"/>3</text:span><text:span text:style-name="T234"/></text:p>
      <text:p text:style-name="P7" loext:marker-style-name="T234"><text:span text:style-name="T234"><text:s text:c="9"/>/ <text:s text:c="25"/>\</text:span><text:span text:style-name="T234"/></text:p>
      <text:p text:style-name="P7" loext:marker-style-name="T234"><text:span text:style-name="T234"><text:s text:c="8"/>5 <text:s text:c="27"/>5</text:span><text:span text:style-name="T234"/></text:p>
      <text:p text:style-name="P7" loext:marker-style-name="T234"><text:span text:style-name="T234"><text:s text:c="7"/>/ <text:s text:c="29"/>\</text:span><text:span text:style-name="T234"/></text:p>
      <text:p text:style-name="P7" loext:marker-style-name="T234"><text:span text:style-name="T234"><text:s text:c="6"/>7 <text:s text:c="31"/>7</text:span><text:span text:style-name="T234"/></text:p>
      <text:p text:style-name="P7" loext:marker-style-name="T234"><text:span text:style-name="T234"><text:s text:c="5"/>/ <text:s text:c="33"/>\</text:span><text:span text:style-name="T234"/></text:p>
      <text:p text:style-name="P7" loext:marker-style-name="T234"><text:span text:style-name="T234"><text:s text:c="4"/>9 <text:s text:c="35"/>9</text:span><text:span text:style-name="T234"/></text:p>
      <text:p text:style-name="P8"/>
      <text:p text:style-name="P45" loext:marker-style-name="T234"><text:span text:style-name="T234"><text:s text:c="3"/></text:span><text:span text:style-name="T110">右邊只有 0 步，Merge 超快 ✓</text:span><text:span text:style-name="T234"> <text:s text:c="4"/>右邊 4 步，Merge 很慢 ✗</text:span></text:p>
      <text:p text:style-name="P6" loext:marker-style-name="T217"><text:span text:style-name="T218">「左偏」這個名字的意思就是：</text:span><text:span text:style-name="T84">樹被故意往左邊壓，把長度都丟到左邊去</text:span><text:span text:style-name="T218">，</text:span><text:span text:style-name="T220">好讓右邊保持最短</text:span><text:span text:style-name="T218">。</text:span></text:p>
      <text:p text:style-name="P10"/>
      <text:h text:style-name="P18" text:outline-level="2" loext:marker-style-name="T20"><text:span text:style-name="T20">8-4 <text:s/></text:span><text:span text:style-name="T21">NPL 是什麼鬼？（先懂它要幹嘛，再看公式）</text:span></text:h>
      <text:p text:style-name="P6" loext:marker-style-name="T217"><text:span text:style-name="T218">很多人就是死在 NPL 這裡。其實它沒那麼可怕——</text:span></text:p>
      <table:table table:name="表格M6" table:style-name="表格M6">
        <table:table-column table:style-name="表格M6.A"/>
        <table:table-row table:style-name="表格M6.1">
          <table:table-cell table:style-name="表格M6.A1" office:value-type="string">
            <text:p text:style-name="P47" loext:marker-style-name="T219"><text:span text:style-name="T168">NPL 只是一個數字，用來「量右邊會不會太長」</text:span><text:span text:style-name="T220">。</text:span></text:p>
          </table:table-cell>
        </table:table-row>
      </table:table>
      <text:p text:style-name="P6" loext:marker-style-name="T217"><text:span text:style-name="T218">先用最白話的方式感覺一下它在數什麼：</text:span></text:p>
      <text:p text:style-name="P43" loext:marker-style-name="T234"><text:span text:style-name="T234"><text:s text:c="5"/>A <text:s text:c="11"/>A <text:s text:c="13"/>A</text:span><text:span text:style-name="T234"/></text:p>
      <text:p text:style-name="P7" loext:marker-style-name="T234"><text:span text:style-name="T234"><text:s text:c="17"/>/ <text:s text:c="13"/>/ \</text:span><text:span text:style-name="T234"/></text:p>
      <text:p text:style-name="P7" loext:marker-style-name="T234"><text:span text:style-name="T234"><text:s text:c="16"/>B <text:s text:c="13"/>B <text:s text:c="2"/>C</text:span><text:span text:style-name="T234"/></text:p>
      <text:p text:style-name="P8"/>
      <text:p text:style-name="P7" loext:marker-style-name="T234"><text:span text:style-name="T234"><text:s text:c="2"/>沒有小孩 <text:s text:c="5"/>只有左邊 <text:s text:c="7"/>左右都有</text:span><text:span text:style-name="T234"/></text:p>
      <text:p text:style-name="P45" loext:marker-style-name="T234"><text:span text:style-name="T234"><text:s text:c="2"/>NPL = 0 <text:s text:c="5"/>NPL = 0 <text:s text:c="7"/>NPL = 1</text:span><text:span text:style-name="T234"/></text:p>
      <text:p text:style-name="P6" loext:marker-style-name="T217"><text:span text:style-name="T218">看出規律了嗎？</text:span><text:span text:style-name="T155">只要有一邊是空的，NPL 就是 0</text:span><text:span text:style-name="T218">。要兩邊都長得夠深，NPL 才會變大。</text:span><text:soft-page-break/><text:span text:style-name="T218">它量的就是「離最近的空位有幾步」。</text:span></text:p>
      <text:p text:style-name="P6" loext:marker-style-name="T217"><text:span text:style-name="T219">怎麼算 NPL？</text:span><text:span text:style-name="T218">其實不用背公式，只要做一件事——「數步數」：</text:span></text:p>
      <table:table table:name="表格N1" table:style-name="表格N1">
        <table:table-column table:style-name="表格N1.A"/>
        <table:table-row table:style-name="表格N1.1">
          <table:table-cell table:style-name="表格N1.A1" office:value-type="string">
            <text:p text:style-name="P9" loext:marker-style-name="T219"><text:span text:style-name="T83">站在某個點上往下看，最少走幾步會碰到一個「還缺小孩的點」</text:span><text:span text:style-name="T219">——</text:span><text:span text:style-name="T104">那個步數就是 NPL</text:span><text:span text:style-name="T219">。</text:span></text:p>
            <text:p text:style-name="P9" loext:marker-style-name="T229"><text:span text:style-name="T230">（「</text:span><text:span text:style-name="T256">缺小孩」＝葉子，或</text:span><text:span text:style-name="T123">只有一個小孩的點</text:span><text:span text:style-name="T230">。）</text:span></text:p>
            <text:p text:style-name="P9" loext:marker-style-name="T229"><text:span text:style-name="T230">• </text:span><text:span text:style-name="T224">這個點自己就缺小孩 </text:span><text:span text:style-name="T230">→ </text:span><text:span text:style-name="T222">0 步，NPL = 0</text:span></text:p>
            <text:p text:style-name="P47" loext:marker-style-name="T229"><text:span text:style-name="T230">• 兩個小孩都在 → 還得再往下走 → NPL 才會 ≥ 1（</text:span><text:span text:style-name="T194">永遠取「比較近」的那一邊</text:span><text:span text:style-name="T230">）</text:span></text:p>
          </table:table-cell>
        </table:table-row>
      </table:table>
      <text:p text:style-name="P6" loext:marker-style-name="T217"><text:span text:style-name="T218">套到剛才那棵樹上，看圖數一遍就懂了：</text:span></text:p>
      <text:p text:style-name="P43" loext:marker-style-name="T234"><text:span text:style-name="T234"><text:s text:c="10"/>3 <text:s text:c="7"/>← 想算它的 NPL</text:span><text:span text:style-name="T234"/></text:p>
      <text:p text:style-name="P7" loext:marker-style-name="T234"><text:span text:style-name="T234"><text:s text:c="9"/>/ \</text:span><text:span text:style-name="T234"/></text:p>
      <text:p text:style-name="P7" loext:marker-style-name="T234"><text:span text:style-name="T234"><text:s text:c="8"/>5 <text:s text:c="2"/>8</text:span><text:span text:style-name="T234"/></text:p>
      <text:p text:style-name="P7" loext:marker-style-name="T234"><text:span text:style-name="T234"><text:s text:c="7"/>/ \</text:span><text:span text:style-name="T234"/></text:p>
      <text:p text:style-name="P7" loext:marker-style-name="T234"><text:span text:style-name="T234"><text:s text:c="6"/>9 <text:s text:c="2"/>7</text:span><text:span text:style-name="T234"/></text:p>
      <text:p text:style-name="P8"/>
      <text:p text:style-name="P7" loext:marker-style-name="T234"><text:span text:style-name="T234"><text:s text:c="2"/></text:span><text:span text:style-name="T235">9、7、8：都是葉子，自己就缺小孩 <text:s/>→ 0 步</text:span><text:span text:style-name="T234"> → </text:span><text:span text:style-name="T255">NPL = 0</text:span></text:p>
      <text:p text:style-name="P7" loext:marker-style-name="T234"><text:span text:style-name="T234"><text:s text:c="2"/></text:span><text:span text:style-name="T235">5 <text:s text:c="3"/>：往下 1 步就碰到葉子 9</text:span><text:span text:style-name="T234"> <text:s text:c="4"/>→ </text:span><text:span text:style-name="T255">NPL = 1</text:span></text:p>
      <text:p text:style-name="P45" loext:marker-style-name="T234"><text:span text:style-name="T234"><text:s text:c="2"/></text:span><text:span text:style-name="T235">3 <text:s text:c="3"/>：往右 1 步就碰到葉子 8</text:span><text:span text:style-name="T234"> <text:s text:c="4"/>→ </text:span><text:span text:style-name="T255">NPL = 1</text:span><text:span text:style-name="T234">（取最近的一邊）</text:span></text:p>
      <text:p text:style-name="P6" loext:marker-style-name="T217"><text:span text:style-name="T218">（看到課本把它寫成公式 NPL = 1 + min(左, 右) 也別怕，意思就是上面這個「數步數」，看懂圖就夠了。）</text:span></text:p>
      <text:p text:style-name="P6" loext:marker-style-name="T217"><text:span text:style-name="T219">左偏性質（Leftist Property）：</text:span><text:span text:style-name="T218">每個節點都必須符合一條規定——</text:span></text:p>
      <table:table table:name="表格M8" table:style-name="表格M8">
        <table:table-column table:style-name="表格M8.A"/>
        <table:table-row table:style-name="表格M8.1">
          <table:table-cell table:style-name="表格M8.A1" office:value-type="string">
            <text:p text:style-name="P9" loext:marker-style-name="T219"><text:span text:style-name="T169">對每個節點：NPL(左子樹) ≥ NPL(右子樹)</text:span></text:p>
            <text:p text:style-name="P9" loext:marker-style-name="T229"><text:span text:style-name="T230">白話：左邊一定比右邊深、或一樣深 → </text:span><text:span text:style-name="T105">右側那條路一定是最短的</text:span><text:span text:style-name="T230">。</text:span></text:p>
            <text:p text:style-name="P47" loext:marker-style-name="T229"><text:span text:style-name="T230">數學上可保證：右側路徑長度 ≤ log(n+1)，所以 Merge 沿右路徑走 → </text:span><text:span text:style-name="T221">O(log n)</text:span><text:span text:style-name="T230">。</text:span></text:p>
          </table:table-cell>
        </table:table-row>
      </table:table>
      <text:p text:style-name="P10"/>
      <text:h text:style-name="P18" text:outline-level="2" loext:marker-style-name="T20"><text:span text:style-name="T20">8-5 <text:s/></text:span><text:span text:style-name="T24">Merge 真正流程：</text:span><text:span text:style-name="T196">其實只有四步</text:span></text:h>
      <text:p text:style-name="P6" loext:marker-style-name="T217"><text:span text:style-name="T218">不管樹多大，Merge 永遠只重複這四步（以 </text:span><text:span text:style-name="T217">Min Leftist Heap</text:span><text:span text:style-name="T218"> 為例）：</text:span></text:p>
      <text:p text:style-name="P43" loext:marker-style-name="T234"><text:span text:style-name="T234"><text:s text:c="2"/>Step1 <text:s/></text:span><text:span text:style-name="T237">比較兩個 Root</text:span></text:p>
      <text:p text:style-name="P7" loext:marker-style-name="T234"><text:span text:style-name="T234"><text:s text:c="9"/>→ </text:span><text:span text:style-name="T238">小的當新 Root</text:span><text:span text:style-name="T234">（Min Heap）</text:span></text:p>
      <text:p text:style-name="P7" loext:marker-style-name="T234"><text:span text:style-name="T234"><text:s text:c="9"/>→ </text:span><text:span text:style-name="T236">大的那棵整棵丟去後面排隊</text:span><text:span text:style-name="T234">（叫它 b）</text:span></text:p>
      <text:p text:style-name="P8"/>
      <text:p text:style-name="P7" loext:marker-style-name="T234"><text:span text:style-name="T234"><text:s text:c="2"/>Step2 <text:s/></text:span><text:span text:style-name="T235">把 b 拿去跟</text:span><text:span text:style-name="T234">「</text:span><text:span text:style-name="T257">新 Root 的右子樹</text:span><text:span text:style-name="T234">」</text:span><text:span text:style-name="T235">Merge</text:span></text:p>
      <text:p text:style-name="P7" loext:marker-style-name="T234"><text:span text:style-name="T234"><text:s text:c="9"/>→ Merge(newRoot.right, b) <text:s text:c="2"/>← 永遠是右子樹！</text:span><text:span text:style-name="T234"/></text:p>
      <text:p text:style-name="P8"/>
      <text:p text:style-name="P7" loext:marker-style-name="T234"><text:span text:style-name="T234"><text:s text:c="2"/>Step3 <text:s/></text:span><text:span text:style-name="T173">Merge 完，看右邊是不是變太長了？</text:span></text:p>
      <text:p text:style-name="P7" loext:marker-style-name="T234"><text:span text:style-name="T234"><text:s text:c="9"/>→ </text:span><text:span text:style-name="T186">若 NPL(右) &gt; NPL(左) 就「交換左右」</text:span><text:span text:style-name="T234">，恢復左偏</text:span></text:p>
      <text:p text:style-name="P8"/>
      <text:p text:style-name="P45" loext:marker-style-name="T234"><text:span text:style-name="T234"><text:s text:c="2"/>Step4 <text:s/>更新這個節點的 NPL</text:span><text:span text:style-name="T234"/></text:p>
      <table:table table:name="表格M9" table:style-name="表格M9">
        <table:table-column table:style-name="表格M9.A"/>
        <table:table-row table:style-name="表格M9.1">
          <table:table-cell table:style-name="表格M9.A1" office:value-type="string">
            <text:p text:style-name="P9" loext:marker-style-name="T219"><text:span text:style-name="T220">口訣：比較 Root → 走右邊 → 必要時交換左右 → 更新 NPL</text:span></text:p>
            <text:p text:style-name="P47" loext:marker-style-name="T229"><text:span text:style-name="T230">整個演算法就是一直重複這四個動作，沿著右邊往下、再一路回來。</text:span></text:p>
          </table:table-cell>
        </table:table-row>
      </table:table>
      <text:p text:style-name="P10"/>
      <text:h text:style-name="P18" text:outline-level="2" loext:marker-style-name="T20"><text:soft-page-break/><text:span text:style-name="T20">8-6 <text:s/></text:span><text:span text:style-name="T21">完整 Merge 範例（一步一步畫圖）</text:span></text:h>
      <text:p text:style-name="P6" loext:marker-style-name="T217"><text:span text:style-name="T220">先說一件會讓你輕鬆很多的事：</text:span><text:span text:style-name="T218">這個範例，我們先「完全不管 NPL」。第一次學 Merge，只要記住一句話就好——</text:span></text:p>
      <table:table table:name="表格X1" table:style-name="表格X1">
        <table:table-column table:style-name="表格X1.A"/>
        <table:table-row table:style-name="表格X1.1">
          <table:table-cell table:style-name="表格X1.A1" office:value-type="string">
            <text:p text:style-name="P9" loext:marker-style-name="T219"><text:span text:style-name="T220">Merge 永遠只走「右子樹」。</text:span></text:p>
            <text:p text:style-name="P47" loext:marker-style-name="T229"><text:span text:style-name="T230">其他所有動作，都是為了保護這一件事而已。</text:span></text:p>
          </table:table-cell>
        </table:table-row>
      </table:table>
      <text:p text:style-name="P6" loext:marker-style-name="T217"><text:span text:style-name="T218">要合併的是這兩棵（先不標任何數字，專心看流程）：</text:span></text:p>
      <text:p text:style-name="P43" loext:marker-style-name="T234"><text:span text:style-name="T234"><text:s text:c="3"/>Heap A <text:s text:c="13"/>Heap B</text:span><text:span text:style-name="T234"/></text:p>
      <text:p text:style-name="P7" loext:marker-style-name="T234"><text:span text:style-name="T234"><text:s text:c="6"/>3 <text:s text:c="18"/>6</text:span><text:span text:style-name="T234"/></text:p>
      <text:p text:style-name="P7" loext:marker-style-name="T234"><text:span text:style-name="T234"><text:s text:c="5"/>/ \ <text:s text:c="16"/>/ \</text:span><text:span text:style-name="T234"/></text:p>
      <text:p text:style-name="P45" loext:marker-style-name="T234"><text:span text:style-name="T234"><text:s text:c="4"/>5 <text:s text:c="2"/>8 <text:s text:c="13"/>12 <text:s text:c="2"/>7</text:span><text:span text:style-name="T234"/></text:p>
      <text:p text:style-name="P6" loext:marker-style-name="T217"><text:span text:style-name="T220">① 比 Root：</text:span><text:span text:style-name="T218">3 和 6 誰小？3 小 → 3 當新 Root。</text:span></text:p>
      <text:p text:style-name="P6" loext:marker-style-name="T217"><text:span text:style-name="T228">重點：</text:span><text:span text:style-name="T218">左子樹 5 完全沒動，之後也不會再動。我們只需要一直處理「右邊」。</text:span></text:p>
      <text:p text:style-name="P43" loext:marker-style-name="T234"><text:span text:style-name="T234"><text:s text:c="7"/>3 <text:s text:c="9"/>← 3 當新 Root</text:span><text:span text:style-name="T234"/></text:p>
      <text:p text:style-name="P7" loext:marker-style-name="T234"><text:span text:style-name="T234"><text:s text:c="6"/>/ \</text:span><text:span text:style-name="T234"/></text:p>
      <text:p text:style-name="P45" loext:marker-style-name="T234"><text:span text:style-name="T234"><text:s text:c="5"/>5 <text:s text:c="2"/>? <text:s text:c="7"/>← 左邊 5 不動；只有右邊「?」要繼續算</text:span><text:span text:style-name="T234"/></text:p>
      <text:p text:style-name="P6" loext:marker-style-name="T217"><text:span text:style-name="T220">② 那 6 放哪？</text:span><text:span text:style-name="T218">不是放左邊，也不是重蓋一棵。6 要「去跟 3 的右子樹 8 合併」。問題就縮小成：8 和 6 怎麼 Merge？</text:span></text:p>
      <text:p text:style-name="P6" loext:marker-style-name="T217"><text:span text:style-name="T220">③ 比 8 和 6：</text:span><text:span text:style-name="T218">6 小 → 6 當 Root。接著換成「6 的右子樹 7」要跟 8 合併。</text:span></text:p>
      <text:p text:style-name="P43" loext:marker-style-name="T234"><text:span text:style-name="T234"><text:s text:c="5"/>6</text:span><text:span text:style-name="T234"/></text:p>
      <text:p text:style-name="P7" loext:marker-style-name="T234"><text:span text:style-name="T234"><text:s text:c="4"/>/ \</text:span><text:span text:style-name="T234"/></text:p>
      <text:p text:style-name="P45" loext:marker-style-name="T234"><text:span text:style-name="T234"><text:s text:c="3"/>12 <text:s text:c="2"/>? <text:s text:c="7"/>← 左邊 12 不動；右邊要算 Merge(7, 8)</text:span><text:span text:style-name="T234"/></text:p>
      <text:p text:style-name="P6" loext:marker-style-name="T217"><text:span text:style-name="T220">④ 比 7 和 8：</text:span><text:span text:style-name="T218">7 小 → 7 當 Root。8 直接接到 7 的右邊（因為 7 的右邊本來是空的）。</text:span></text:p>
      <text:p text:style-name="P43" loext:marker-style-name="T234"><text:span text:style-name="T234"><text:s text:c="3"/>7</text:span><text:span text:style-name="T234"/></text:p>
      <text:p text:style-name="P7" loext:marker-style-name="T234"><text:span text:style-name="T234"><text:s text:c="4"/>\</text:span><text:span text:style-name="T234"/></text:p>
      <text:p text:style-name="P45" loext:marker-style-name="T234"><text:span text:style-name="T234"><text:s text:c="5"/>8 <text:s text:c="9"/>← 先接成這樣</text:span><text:span text:style-name="T234"/></text:p>
      <text:p text:style-name="P6" loext:marker-style-name="T217"><text:span text:style-name="T228">⑤ 這一步是大家最卡的地方。</text:span><text:span text:style-name="T218">你一定會想：幹嘛突然要交換左右？原因只有一句話——</text:span></text:p>
      <table:table table:name="表格X2" table:style-name="表格X2">
        <table:table-column table:style-name="表格X2.A"/>
        <table:table-row table:style-name="表格X2.1">
          <table:table-cell table:style-name="表格X2.A1" office:value-type="string">
            <text:p text:style-name="P9" loext:marker-style-name="T219"><text:span text:style-name="T220">Leftist Heap 的規定：右邊不能比左邊深。</text:span></text:p>
            <text:p text:style-name="P47" loext:marker-style-name="T229"><text:span text:style-name="T230">現在 7 的右邊有個 8、左邊卻是空的 → 右邊比較深 → 所以把它交換過來。</text:span></text:p>
          </table:table-cell>
        </table:table-row>
      </table:table>
      <text:p text:style-name="P6" loext:marker-style-name="T217"><text:span text:style-name="T218">交換後（把 8 搬到左邊，右邊就空了、變短了）：</text:span></text:p>
      <text:p text:style-name="P43" loext:marker-style-name="T234"><text:span text:style-name="T234"><text:s text:c="3"/>7</text:span><text:span text:style-name="T234"/></text:p>
      <text:p text:style-name="P7" loext:marker-style-name="T234"><text:span text:style-name="T234"><text:s text:c="2"/>/</text:span><text:span text:style-name="T234"/></text:p>
      <text:p text:style-name="P45" loext:marker-style-name="T234"><text:span text:style-name="T234"><text:s/>8 <text:s text:c="11"/>← 右邊清空，右邊變短 ✓</text:span><text:span text:style-name="T234"/></text:p>
      <text:p text:style-name="P6" loext:marker-style-name="T217"><text:span text:style-name="T220">接下來就是「一路往回接」，每接回一層，就再看一次右邊有沒有比左邊深。</text:span></text:p>
      <text:p text:style-name="P6" loext:marker-style-name="T217"><text:span text:style-name="T220">⑥ 把剛算好的 7 接回 6 的右邊：</text:span></text:p>
      <text:p text:style-name="P43" loext:marker-style-name="T234"><text:span text:style-name="T234"><text:s text:c="5"/>6</text:span><text:span text:style-name="T234"/></text:p>
      <text:p text:style-name="P7" loext:marker-style-name="T234"><text:span text:style-name="T234"><text:s text:c="4"/>/ \</text:span><text:span text:style-name="T234"/></text:p>
      <text:p text:style-name="P7" loext:marker-style-name="T234"><text:span text:style-name="T234"><text:s text:c="3"/>12 <text:s text:c="2"/>7</text:span><text:span text:style-name="T234"/></text:p>
      <text:p text:style-name="P7" loext:marker-style-name="T234"><text:span text:style-name="T234"><text:s text:c="7"/>/</text:span><text:span text:style-name="T234"/></text:p>
      <text:p text:style-name="P45" loext:marker-style-name="T234"><text:span text:style-name="T234"><text:s text:c="6"/>8</text:span><text:span text:style-name="T234"/></text:p>
      <text:p text:style-name="P6" loext:marker-style-name="T217"><text:span text:style-name="T218">看 6 的左右：左邊 12、右邊 7，兩邊差不多深 → 不用交換。</text:span></text:p>
      <text:p text:style-name="P6" loext:marker-style-name="T217"><text:soft-page-break/><text:span text:style-name="T220">⑦ 再把剛算好的 6 接回 3 的右邊：</text:span></text:p>
      <text:p text:style-name="P43" loext:marker-style-name="T234"><text:span text:style-name="T234"><text:s text:c="5"/>3</text:span><text:span text:style-name="T234"/></text:p>
      <text:p text:style-name="P7" loext:marker-style-name="T234"><text:span text:style-name="T234"><text:s text:c="4"/>/ \</text:span><text:span text:style-name="T234"/></text:p>
      <text:p text:style-name="P7" loext:marker-style-name="T234"><text:span text:style-name="T234"><text:s text:c="3"/>5 <text:s text:c="2"/>6 <text:s text:c="7"/>← 先接成這樣</text:span><text:span text:style-name="T234"/></text:p>
      <text:p text:style-name="P7" loext:marker-style-name="T234"><text:span text:style-name="T234"><text:s text:c="6"/>/ \</text:span><text:span text:style-name="T234"/></text:p>
      <text:p text:style-name="P7" loext:marker-style-name="T234"><text:span text:style-name="T234"><text:s text:c="4"/>12 <text:s text:c="2"/>7</text:span><text:span text:style-name="T234"/></text:p>
      <text:p text:style-name="P7" loext:marker-style-name="T234"><text:span text:style-name="T234"><text:s text:c="8"/>/</text:span><text:span text:style-name="T234"/></text:p>
      <text:p text:style-name="P45" loext:marker-style-name="T234"><text:span text:style-name="T234"><text:s text:c="7"/>8</text:span><text:span text:style-name="T234"/></text:p>
      <text:p text:style-name="P6" loext:marker-style-name="T217"><text:span text:style-name="T218">看 3 的左右：左邊 5 只有一層、右邊 6 那一大串很深 → </text:span><text:span text:style-name="T228">右邊比較深 → 交換！</text:span></text:p>
      <text:p text:style-name="P6" loext:marker-style-name="T217"><text:span text:style-name="T220">交換之後，就是最終答案：</text:span></text:p>
      <text:p text:style-name="P43" loext:marker-style-name="T234"><text:span text:style-name="T234"><text:s text:c="3"/>最終結果</text:span><text:span text:style-name="T234"/></text:p>
      <text:p text:style-name="P7" loext:marker-style-name="T234"><text:span text:style-name="T234"><text:s text:c="8"/>3</text:span><text:span text:style-name="T234"/></text:p>
      <text:p text:style-name="P7" loext:marker-style-name="T234"><text:span text:style-name="T234"><text:s text:c="7"/>/ \</text:span><text:span text:style-name="T234"/></text:p>
      <text:p text:style-name="P7" loext:marker-style-name="T234"><text:span text:style-name="T234"><text:s text:c="6"/>6 <text:s text:c="2"/>5</text:span><text:span text:style-name="T234"/></text:p>
      <text:p text:style-name="P7" loext:marker-style-name="T234"><text:span text:style-name="T234"><text:s text:c="5"/>/ \</text:span><text:span text:style-name="T234"/></text:p>
      <text:p text:style-name="P7" loext:marker-style-name="T234"><text:span text:style-name="T234"><text:s text:c="3"/>12 <text:s text:c="2"/>7</text:span><text:span text:style-name="T234"/></text:p>
      <text:p text:style-name="P7" loext:marker-style-name="T234"><text:span text:style-name="T234"><text:s text:c="7"/>/</text:span><text:span text:style-name="T234"/></text:p>
      <text:p text:style-name="P45" loext:marker-style-name="T234"><text:span text:style-name="T234"><text:s text:c="6"/>8</text:span><text:span text:style-name="T234"/></text:p>
      <table:table table:name="表格X3" table:style-name="表格X3">
        <table:table-column table:style-name="表格X3.A"/>
        <table:table-row table:style-name="表格X3.1">
          <table:table-cell table:style-name="表格X3.A1" office:value-type="string">
            <text:p text:style-name="P9" loext:marker-style-name="T219"><text:span text:style-name="T220">驗證一下就安心了：</text:span></text:p>
            <text:p text:style-name="P9" loext:marker-style-name="T219"><text:span text:style-name="T230">Min Heap（父 &lt; 子）：3&lt;6、3&lt;5、6&lt;12、6&lt;7、7&lt;8 ✓</text:span></text:p>
            <text:p text:style-name="P47" loext:marker-style-name="T229"><text:span text:style-name="T230">每個節點：右邊都沒有比左邊深 ✓（這就是「左偏」）</text:span></text:p>
          </table:table-cell>
        </table:table-row>
      </table:table>
      <table:table table:name="表格X4" table:style-name="表格X4">
        <table:table-column table:style-name="表格X4.A"/>
        <table:table-row table:style-name="表格X4.1">
          <table:table-cell table:style-name="表格X4.A1" office:value-type="string">
            <text:p text:style-name="P9" loext:marker-style-name="T219"><text:span text:style-name="T220">口訣：整個 Merge 其實只有這幾件事一直重複——</text:span></text:p>
            <text:p text:style-name="P9" loext:marker-style-name="T219"><text:span text:style-name="T230">① Root 比大小，小的當家（大的那棵丟去右邊繼續排）</text:span></text:p>
            <text:p text:style-name="P9" loext:marker-style-name="T219"><text:span text:style-name="T230">② 接好之後，右邊比左邊深 → 就「交換左右」</text:span></text:p>
            <text:p text:style-name="P47" loext:marker-style-name="T229"><text:span text:style-name="T230">③ 回上一層，再檢查一次 → 一路重複到頂</text:span></text:p>
          </table:table-cell>
        </table:table-row>
      </table:table>
      <text:p text:style-name="P6" loext:marker-style-name="T217"><text:span text:style-name="T218">（那程式怎麼知道「右邊比較深」？就是用前面 8-4 講的 NPL 這個數字來判斷。但第一次學，會「看圖判斷」就完全夠了。）</text:span></text:p>
      <text:p text:style-name="P10"/>
      <text:h text:style-name="P18" text:outline-level="2" loext:marker-style-name="T20"><text:span text:style-name="T20">8-7 <text:s/></text:span><text:span text:style-name="T21">時間複雜度與重點整理</text:span></text:h>
      <text:p text:style-name="P6" loext:marker-style-name="T217"><text:span text:style-name="T218">為什麼 Leftist Heap 快？因為它不重建整棵樹，只沿「被 NPL 保證很短的右路徑」遞迴。</text:span></text:p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253"><text:span text:style-name="T254">操作</text:span><text:span text:style-name="T253"/></text:p>
          </table:table-cell>
          <table:table-cell table:style-name="表格47.A1" office:value-type="string">
            <text:p text:style-name="Standard" loext:marker-style-name="T253"><text:span text:style-name="T254">普通 </text:span><text:span text:style-name="T253">Binary Heap</text:span></text:p>
          </table:table-cell>
          <table:table-cell table:style-name="表格47.A1" office:value-type="string">
            <text:p text:style-name="Standard" loext:marker-style-name="T253"><text:span text:style-name="T253">Leftist Heap</text:span><text:span text:style-name="T253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32"><text:span text:style-name="T232">Insert</text:span><text:span text:style-name="T232"/></text:p>
          </table:table-cell>
          <table:table-cell table:style-name="表格47.A2" office:value-type="string">
            <text:p text:style-name="Standard" loext:marker-style-name="T232"><text:span text:style-name="T232">O(log n)</text:span><text:span text:style-name="T232"/></text:p>
          </table:table-cell>
          <table:table-cell table:style-name="表格47.A2" office:value-type="string">
            <text:p text:style-name="Standard" loext:marker-style-name="T232"><text:span text:style-name="T232">O(log n)</text:span><text:span text:style-name="T232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232"><text:span text:style-name="T232">Extract-Min/Max</text:span><text:span text:style-name="T232"/></text:p>
          </table:table-cell>
          <table:table-cell table:style-name="表格47.A3" office:value-type="string">
            <text:p text:style-name="Standard" loext:marker-style-name="T232"><text:span text:style-name="T232">O(log n)</text:span><text:span text:style-name="T232"/></text:p>
          </table:table-cell>
          <table:table-cell table:style-name="表格47.A3" office:value-type="string">
            <text:p text:style-name="Standard" loext:marker-style-name="T232"><text:span text:style-name="T232">O(log n)</text:span><text:span text:style-name="T232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232"><text:span text:style-name="T232">Merge</text:span><text:span text:style-name="T233">（合併兩個 </text:span><text:span text:style-name="T232">Heap</text:span><text:span text:style-name="T233">）</text:span></text:p>
          </table:table-cell>
          <table:table-cell table:style-name="表格47.A2" office:value-type="string">
            <text:p text:style-name="Standard" loext:marker-style-name="T232"><text:span text:style-name="T232">O(n+m) </text:span><text:span text:style-name="T233">重建</text:span></text:p>
          </table:table-cell>
          <table:table-cell table:style-name="表格47.A2" office:value-type="string">
            <text:p text:style-name="Standard" loext:marker-style-name="T232"><text:span text:style-name="T232">O(log n + log m) ★</text:span><text:span text:style-name="T232"/></text:p>
          </table:table-cell>
        </table:table-row>
      </table:table>
      <text:p text:style-name="P9"/>
      <table:table table:name="表格M11" table:style-name="表格M11">
        <table:table-column table:style-name="表格M11.A"/>
        <table:table-row table:style-name="表格M11.1">
          <table:table-cell table:style-name="表格M11.A1" office:value-type="string">
            <text:p text:style-name="P9" loext:marker-style-name="T219"><text:span text:style-name="T219">⚠️ 陷阱：Min Leftist Heap vs. Max Leftist Heap</text:span></text:p>
            <text:p text:style-name="P9" loext:marker-style-name="T229"><text:span text:style-name="T230">Min Leftist Heap → Merge 時，</text:span><text:span text:style-name="T221">較小</text:span><text:span text:style-name="T230">的 Root 當新 Root。</text:span></text:p>
            <text:p text:style-name="P9" loext:marker-style-name="T229"><text:span text:style-name="T230">Max Leftist Heap → Merge 時，</text:span><text:span text:style-name="T221">較大</text:span><text:span text:style-name="T230">的 Root 當新 Root。</text:span></text:p>
            <text:p text:style-name="P47" loext:marker-style-name="T229"><text:soft-page-break/><text:span text:style-name="T230">四個步驟完全一樣，只有「誰當新 Root」的比較方向相反。考試看清楚題目要的是哪一種！</text:span></text:p>
          </table:table-cell>
        </table:table-row>
      </table:table>
      <text:p text:style-name="P1"/>
      <text:h text:style-name="P19" text:outline-level="1" loext:marker-style-name="T3"><text:span text:style-name="T4">九、</text:span><text:span text:style-name="T10">Heap</text:span><text:span text:style-name="T11"> vs. </text:span><text:span text:style-name="T10">BST / AVL / Red-Black Tree</text:span><text:span text:style-name="T11"> </text:span><text:span text:style-name="T4">深度比較</text:span></text:h>
      <text:p text:style-name="P34" loext:marker-style-name="T30"><text:span text:style-name="T31">這是許多考生最容易混淆的地方，必須徹底釐清各資料結構的設計目的。</text:span><text:span text:style-name="T30"/></text:p>
      <text:p text:style-name="P1"/>
      <text:h text:style-name="P17" text:outline-level="2" loext:marker-style-name="T17"><text:span text:style-name="T18">各結構設計目的一覽</text:span><text:span text:style-name="T17"/></text:h>
      <text:p text:style-name="P1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33" loext:marker-style-name="T5"><text:span text:style-name="T6">結構</text:span><text:span text:style-name="T5"/></text:p>
            </table:table-cell>
            <table:table-cell table:style-name="表格49.A1" office:value-type="string">
              <text:p text:style-name="P33" loext:marker-style-name="T5"><text:span text:style-name="T6">設計目的</text:span><text:span text:style-name="T5"/></text:p>
            </table:table-cell>
            <table:table-cell table:style-name="表格49.A1" office:value-type="string">
              <text:p text:style-name="P33" loext:marker-style-name="T5"><text:span text:style-name="T6">核心保證</text:span><text:span text:style-name="T5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33" loext:marker-style-name="T42"><text:span text:style-name="T49">BST</text:span><text:span text:style-name="T42"/></text:p>
          </table:table-cell>
          <table:table-cell table:style-name="表格49.A2" office:value-type="string">
            <text:p text:style-name="P33" loext:marker-style-name="T42"><text:span text:style-name="T60">快速搜尋特定值</text:span><text:span text:style-name="T42"/></text:p>
          </table:table-cell>
          <table:table-cell table:style-name="表格49.A2" office:value-type="string">
            <text:p text:style-name="P33" loext:marker-style-name="T42"><text:span text:style-name="T60">左 </text:span><text:span text:style-name="T49">&lt; </text:span><text:span text:style-name="T60">根 </text:span><text:span text:style-name="T49">&lt; </text:span><text:span text:style-name="T60">右</text:span></text:p>
          </table:table-cell>
        </table:table-row>
        <table:table-row table:style-name="表格49.1">
          <table:table-cell table:style-name="表格49.A2" office:value-type="string">
            <text:p text:style-name="P33" loext:marker-style-name="T42"><text:span text:style-name="T49">AVL Tree</text:span><text:span text:style-name="T42"/></text:p>
          </table:table-cell>
          <table:table-cell table:style-name="表格49.A2" office:value-type="string">
            <text:p text:style-name="P33" loext:marker-style-name="T42"><text:span text:style-name="T60">平衡 </text:span><text:span text:style-name="T49">BST</text:span><text:span text:style-name="T60">，穩定搜尋</text:span></text:p>
          </table:table-cell>
          <table:table-cell table:style-name="表格49.A2" office:value-type="string">
            <text:p text:style-name="P33" loext:marker-style-name="T42"><text:span text:style-name="T60">高度差 ≤ </text:span><text:span text:style-name="T49">1</text:span><text:span text:style-name="T60">，</text:span><text:span text:style-name="T49">h = O(log n)</text:span></text:p>
          </table:table-cell>
        </table:table-row>
        <table:table-row table:style-name="表格49.1">
          <table:table-cell table:style-name="表格49.A2" office:value-type="string">
            <text:p text:style-name="P33" loext:marker-style-name="T42"><text:span text:style-name="T49">Red-Black Tree</text:span><text:span text:style-name="T42"/></text:p>
          </table:table-cell>
          <table:table-cell table:style-name="表格49.A2" office:value-type="string">
            <text:p text:style-name="P33" loext:marker-style-name="T42"><text:span text:style-name="T60">平衡 </text:span><text:span text:style-name="T49">BST</text:span><text:span text:style-name="T60">，減少旋轉</text:span></text:p>
          </table:table-cell>
          <table:table-cell table:style-name="表格49.A2" office:value-type="string">
            <text:p text:style-name="P33" loext:marker-style-name="T42"><text:span text:style-name="T60">顏色規則，</text:span><text:span text:style-name="T49">h = O(log n)</text:span></text:p>
          </table:table-cell>
        </table:table-row>
        <table:table-row table:style-name="表格49.1">
          <table:table-cell table:style-name="表格49.A2" office:value-type="string">
            <text:p text:style-name="P33" loext:marker-style-name="T42"><text:span text:style-name="T49">Heap</text:span><text:span text:style-name="T42"/></text:p>
          </table:table-cell>
          <table:table-cell table:style-name="表格49.A2" office:value-type="string">
            <text:p text:style-name="P33" loext:marker-style-name="T42"><text:span text:style-name="T60">快速取最大</text:span><text:span text:style-name="T49">/</text:span><text:span text:style-name="T60">最小值</text:span></text:p>
          </table:table-cell>
          <table:table-cell table:style-name="表格49.A2" office:value-type="string">
            <text:p text:style-name="P33" loext:marker-style-name="T42"><text:span text:style-name="T60">父 ≥ 子（</text:span><text:span text:style-name="T49">Max</text:span><text:span text:style-name="T60">）或父 ≤ 子（</text:span><text:span text:style-name="T49">Min</text:span><text:span text:style-name="T60">）</text:span></text:p>
          </table:table-cell>
        </table:table-row>
      </table:table>
      <text:p text:style-name="P1"/>
      <text:h text:style-name="P17" text:outline-level="2" loext:marker-style-name="T17"><text:span text:style-name="T18">時間複雜度全比較</text:span><text:span text:style-name="T17"/></text:h>
      <text:p text:style-name="P1"/>
      <table:table table:name="表格50" table:style-name="表格50">
        <table:table-column table:style-name="表格50.A" table:number-columns-repeated="4"/>
        <table:table-header-rows>
          <table:table-row table:style-name="表格50.1">
            <table:table-cell table:style-name="表格50.A1" office:value-type="string">
              <text:p text:style-name="P33" loext:marker-style-name="T5"><text:span text:style-name="T13">操作</text:span><text:span text:style-name="T5"/></text:p>
            </table:table-cell>
            <table:table-cell table:style-name="表格50.A1" office:value-type="string">
              <text:p text:style-name="P33" loext:marker-style-name="T5"><text:span text:style-name="T14">BST</text:span><text:span text:style-name="T13">（平衡）</text:span><text:span text:style-name="T14">/ AVL / RB</text:span></text:p>
            </table:table-cell>
            <table:table-cell table:style-name="表格50.A1" office:value-type="string">
              <text:p text:style-name="P33" loext:marker-style-name="T5"><text:span text:style-name="T14">Heap</text:span><text:span text:style-name="T5"/></text:p>
            </table:table-cell>
            <table:table-cell table:style-name="表格50.A1" office:value-type="string">
              <text:p text:style-name="P33" loext:marker-style-name="T5"><text:span text:style-name="T13">說明</text:span><text:span text:style-name="T5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33" loext:marker-style-name="T42"><text:span text:style-name="T60">搜尋特定值</text:span><text:span text:style-name="T42"/></text:p>
          </table:table-cell>
          <table:table-cell table:style-name="表格50.A2" office:value-type="string">
            <text:p text:style-name="P33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33" loext:marker-style-name="T42"><text:span text:style-name="T49">❌ O(n)</text:span><text:span text:style-name="T42"/></text:p>
          </table:table-cell>
          <table:table-cell table:style-name="表格50.A2" office:value-type="string">
            <text:p text:style-name="P33" loext:marker-style-name="T42"><text:span text:style-name="T49">Heap </text:span><text:span text:style-name="T60">無排序規則</text:span></text:p>
          </table:table-cell>
        </table:table-row>
        <table:table-row table:style-name="表格50.1">
          <table:table-cell table:style-name="表格50.A3" office:value-type="string">
            <text:p text:style-name="P33" loext:marker-style-name="T42"><text:span text:style-name="T60">找最大值（</text:span><text:span text:style-name="T49">view</text:span><text:span text:style-name="T60">）</text:span></text:p>
          </table:table-cell>
          <table:table-cell table:style-name="表格50.A3" office:value-type="string">
            <text:p text:style-name="P33" loext:marker-style-name="T42"><text:span text:style-name="T49">O(log n)</text:span><text:span text:style-name="T42"/></text:p>
          </table:table-cell>
          <table:table-cell table:style-name="表格50.A3" office:value-type="string">
            <text:p text:style-name="P33" loext:marker-style-name="T42"><text:span text:style-name="T49">✅ O(1)</text:span><text:span text:style-name="T42"/></text:p>
          </table:table-cell>
          <table:table-cell table:style-name="表格50.A3" office:value-type="string">
            <text:p text:style-name="P33" loext:marker-style-name="T42"><text:span text:style-name="T49">Heap Root </text:span><text:span text:style-name="T60">即最大值</text:span></text:p>
          </table:table-cell>
        </table:table-row>
        <table:table-row table:style-name="表格50.1">
          <table:table-cell table:style-name="表格50.A2" office:value-type="string">
            <text:p text:style-name="P33" loext:marker-style-name="T42"><text:span text:style-name="T49">Extract-Max</text:span><text:span text:style-name="T42"/></text:p>
          </table:table-cell>
          <table:table-cell table:style-name="表格50.A2" office:value-type="string">
            <text:p text:style-name="P33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33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33" loext:marker-style-name="T42"><text:span text:style-name="T60">相同</text:span><text:span text:style-name="T42"/></text:p>
          </table:table-cell>
        </table:table-row>
        <table:table-row table:style-name="表格50.1">
          <table:table-cell table:style-name="表格50.A3" office:value-type="string">
            <text:p text:style-name="P33" loext:marker-style-name="T42"><text:span text:style-name="T49">Insert</text:span><text:span text:style-name="T42"/></text:p>
          </table:table-cell>
          <table:table-cell table:style-name="表格50.A3" office:value-type="string">
            <text:p text:style-name="P33" loext:marker-style-name="T42"><text:span text:style-name="T49">O(log n)</text:span><text:span text:style-name="T42"/></text:p>
          </table:table-cell>
          <table:table-cell table:style-name="表格50.A3" office:value-type="string">
            <text:p text:style-name="P33" loext:marker-style-name="T42"><text:span text:style-name="T49">O(log n)</text:span><text:span text:style-name="T42"/></text:p>
          </table:table-cell>
          <table:table-cell table:style-name="表格50.A3" office:value-type="string">
            <text:p text:style-name="P33" loext:marker-style-name="T42"><text:span text:style-name="T60">相同</text:span><text:span text:style-name="T42"/></text:p>
          </table:table-cell>
        </table:table-row>
        <table:table-row table:style-name="表格50.1">
          <table:table-cell table:style-name="表格50.A2" office:value-type="string">
            <text:p text:style-name="P33" loext:marker-style-name="T42"><text:span text:style-name="T49">Delete </text:span><text:span text:style-name="T60">任意</text:span></text:p>
          </table:table-cell>
          <table:table-cell table:style-name="表格50.A2" office:value-type="string">
            <text:p text:style-name="P33" loext:marker-style-name="T42"><text:span text:style-name="T49">O(log n)</text:span><text:span text:style-name="T42"/></text:p>
          </table:table-cell>
          <table:table-cell table:style-name="表格50.A2" office:value-type="string">
            <text:p text:style-name="P33" loext:marker-style-name="T42"><text:span text:style-name="T49">O(n) </text:span><text:span text:style-name="T60">找 </text:span><text:span text:style-name="T49">+ O(log n) </text:span><text:span text:style-name="T60">刪</text:span></text:p>
          </table:table-cell>
          <table:table-cell table:style-name="表格50.A2" office:value-type="string">
            <text:p text:style-name="P33" loext:marker-style-name="T42"><text:span text:style-name="T49">Heap </text:span><text:span text:style-name="T60">找到要刪的節點要 </text:span><text:span text:style-name="T49">O(n)</text:span></text:p>
          </table:table-cell>
        </table:table-row>
      </table:table>
      <text:p text:style-name="P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3" loext:marker-style-name="T42"><text:span text:style-name="T49">⚠️ <text:s/></text:span><text:span text:style-name="T60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3" loext:marker-style-name="T42"><text:span text:style-name="T60">「</text:span><text:span text:style-name="T49">Max Heap </text:span><text:span text:style-name="T60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3"/>
          </table:table-cell>
        </table:table-row>
        <table:table-row table:style-name="表格51.1">
          <table:table-cell table:style-name="表格51.A1" office:value-type="string">
            <text:p text:style-name="P3" loext:marker-style-name="T42"><text:span text:style-name="T49">❌ </text:span><text:span text:style-name="T60">錯誤答案：</text:span><text:span text:style-name="T49">O(log n) <text:s/>← </text:span><text:span text:style-name="T60">看到樹就聯想 </text:span><text:span text:style-name="T49">log n </text:span><text:span text:style-name="T60">是常見誤區</text:span></text:p>
          </table:table-cell>
        </table:table-row>
        <table:table-row table:style-name="表格51.1">
          <table:table-cell table:style-name="表格51.A1" office:value-type="string">
            <text:p text:style-name="P3" loext:marker-style-name="T42"><text:span text:style-name="T49">✅ </text:span><text:span text:style-name="T60">正確答案：</text:span><text:span text:style-name="T49">O(n)</text:span></text:p>
          </table:table-cell>
        </table:table-row>
        <table:table-row table:style-name="表格51.1">
          <table:table-cell table:style-name="表格51.A1" office:value-type="string">
            <text:p text:style-name="P3"/>
          </table:table-cell>
        </table:table-row>
        <table:table-row table:style-name="表格51.1">
          <table:table-cell table:style-name="表格51.A1" office:value-type="string">
            <text:p text:style-name="P3" loext:marker-style-name="T42"><text:span text:style-name="T60">原因：</text:span><text:span text:style-name="T49">Heap </text:span><text:span text:style-name="T60">只保證「父 ≥ 子」，無法判斷目標在左或右子樹，</text:span></text:p>
          </table:table-cell>
        </table:table-row>
        <text:soft-page-break/>
        <table:table-row table:style-name="表格51.1">
          <table:table-cell table:style-name="表格51.A1" office:value-type="string">
            <text:p text:style-name="P3" loext:marker-style-name="T42"><text:span text:style-name="T49"><text:s text:c="6"/></text:span><text:span text:style-name="T60">最壞情況需掃描所有節點。</text:span></text:p>
          </table:table-cell>
        </table:table-row>
      </table:table>
      <text:p text:style-name="P1"/>
      <text:h text:style-name="P17" text:outline-level="2" loext:marker-style-name="T17"><text:span text:style-name="T18">為什麼 </text:span><text:span text:style-name="T26">Linux</text:span><text:span text:style-name="T27"> </text:span><text:span text:style-name="T18">選擇 </text:span><text:span text:style-name="T26">Red-Black Tree</text:span><text:span text:style-name="T27"> </text:span><text:span text:style-name="T18">而非 </text:span><text:span text:style-name="T26">AVL</text:span><text:span text:style-name="T18">？</text:span></text:h>
      <text:list text:continue-list="list3862013675" text:style-name="WWNum2">
        <text:list-item>
          <text:p text:style-name="P41" loext:marker-style-name="T30"><text:span text:style-name="T48">AVL</text:span><text:span text:style-name="T31">：搜尋最快，但插入</text:span><text:span text:style-name="T48">/</text:span><text:span text:style-name="T31">刪除旋轉次數多，修改成本高。</text:span></text:p>
        </text:list-item>
        <text:list-item>
          <text:p text:style-name="P41" loext:marker-style-name="T30"><text:span text:style-name="T48">Red-Black Tree</text:span><text:span text:style-name="T31">：搜尋稍慢，但插入</text:span><text:span text:style-name="T48">/</text:span><text:span text:style-name="T31">刪除旋轉較少，整體效能均衡。</text:span></text:p>
        </text:list-item>
        <text:list-item>
          <text:p text:style-name="P41" loext:marker-style-name="T30"><text:span text:style-name="T48">Linux Kernel </text:span><text:span text:style-name="T31">的 </text:span><text:span text:style-name="T48">CFS </text:span><text:span text:style-name="T31">排程器、記憶體管理（</text:span><text:span text:style-name="T48">VMA</text:span><text:span text:style-name="T31">）、</text:span><text:span text:style-name="T48">Timer </text:span><text:span text:style-name="T31">均採用 </text:span><text:span text:style-name="T48">Red-Black Tree</text:span><text:span text:style-name="T31">。</text:span></text:p>
        </text:list-item>
      </text:list>
      <text:p text:style-name="P1"/>
      <text:p text:style-name="P1"/>
      <text:h text:style-name="P19" text:outline-level="1" loext:marker-style-name="T3"><text:span text:style-name="T4">十、公職考試常見陷阱整理</text:span><text:span text:style-name="T3"/></text:h>
      <text:p text:style-name="P1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1</text:span><text:span text:style-name="T60">：</text:span><text:span text:style-name="T49">Heap </text:span><text:span text:style-name="T60">搜尋 ≠ </text:span><text:span text:style-name="T49">O(log n)</text:span><text:span text:style-name="T60">，正確為 </text:span><text:span text:style-name="T49">O(n)</text:span><text:span text:style-name="T60">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2</text:span><text:span text:style-name="T60">：</text:span><text:span text:style-name="T49">Build Heap ≠ O(n log n)</text:span><text:span text:style-name="T60">，</text:span><text:span text:style-name="T49">Bottom-Up </text:span><text:span text:style-name="T60">法正確為 </text:span><text:span text:style-name="T49">O(n)</text:span><text:span text:style-name="T60">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3</text:span><text:span text:style-name="T60">：</text:span><text:span text:style-name="T49">Heap </text:span><text:span text:style-name="T60">是 </text:span><text:span text:style-name="T49">Complete Binary Tree</text:span><text:span text:style-name="T60">，不是 </text:span><text:span text:style-name="T49">Full Binary Tree</text:span><text:span text:style-name="T60">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4</text:span><text:span text:style-name="T60">：陣列索引從 </text:span><text:span text:style-name="T49">1 </text:span><text:span text:style-name="T60">開始，</text:span><text:span text:style-name="T49">parent = ⌊i/2⌋</text:span><text:span text:style-name="T60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5</text:span><text:span text:style-name="T60">：</text:span><text:span text:style-name="T49">Interval Heap </text:span><text:span text:style-name="T60">每個節點存的是區間 </text:span><text:span text:style-name="T49">[min, max]</text:span><text:span text:style-name="T60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6</text:span><text:span text:style-name="T60">：</text:span><text:span text:style-name="T49">Merge Leftist Heap </text:span><text:span text:style-name="T60">的新 </text:span><text:span text:style-name="T49">Root </text:span><text:span text:style-name="T60">是兩個 </text:span><text:span text:style-name="T49">Root </text:span><text:span text:style-name="T60">中較小的（</text:span><text:span text:style-name="T49">Min Heap</text:span><text:span text:style-name="T60">），</text:span></text:p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49"><text:s text:c="8"/>Max Leftist Heap </text:span><text:span text:style-name="T60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7</text:span><text:span text:style-name="T60">：</text:span><text:span text:style-name="T49">Heap Sort </text:span><text:span text:style-name="T60">是 </text:span><text:span text:style-name="T49">Unstable Sort</text:span><text:span text:style-name="T60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3"/>
          </table:table-cell>
        </table:table-row>
        <table:table-row table:style-name="表格52.1">
          <table:table-cell table:style-name="表格52.A1" office:value-type="string">
            <text:p text:style-name="P3" loext:marker-style-name="T42"><text:span text:style-name="T60">陷阱 </text:span><text:span text:style-name="T49">8</text:span><text:span text:style-name="T60">：</text:span><text:span text:style-name="T49">Heap Sort </text:span><text:span text:style-name="T60">空間複雜度是 </text:span><text:span text:style-name="T49">O(1)</text:span><text:span text:style-name="T60">（</text:span><text:span text:style-name="T49">In-place</text:span><text:span text:style-name="T60">），不需額外空間。</text:span></text:p>
          </table:table-cell>
        </table:table-row>
      </table:table>
      <text:p text:style-name="P1"/>
      <text:p text:style-name="P1"/>
      <text:h text:style-name="P19" text:outline-level="1" loext:marker-style-name="T3"><text:span text:style-name="T4">十一、考試必背速查表（最終記憶版）</text:span><text:span text:style-name="T3"/></text:h>
      <text:p text:style-name="P1"/>
      <text:h text:style-name="P17" text:outline-level="2" loext:marker-style-name="T17"><text:soft-page-break/><text:span text:style-name="T18">核心定義</text:span><text:span text:style-name="T17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" loext:marker-style-name="T42"><text:span text:style-name="T49">Heap = Complete Binary Tree + Heap Property</text:span><text:span text:style-name="T60">（</text:span><text:span text:style-name="T49">parent ≤/≥ child</text:span><text:span text:style-name="T60">）</text:span></text:p>
          </table:table-cell>
        </table:table-row>
        <table:table-row table:style-name="表格53.1">
          <table:table-cell table:style-name="表格53.A1" office:value-type="string">
            <text:p text:style-name="P3"/>
          </table:table-cell>
        </table:table-row>
        <table:table-row table:style-name="表格53.1">
          <table:table-cell table:style-name="表格53.A1" office:value-type="string">
            <text:p text:style-name="P3" loext:marker-style-name="T42"><text:span text:style-name="T60">陣列索引（從 </text:span><text:span text:style-name="T49">1 </text:span><text:span text:style-name="T60">起）：</text:span></text:p>
          </table:table-cell>
        </table:table-row>
        <table:table-row table:style-name="表格53.1">
          <table:table-cell table:style-name="表格53.A1" office:value-type="string">
            <text:p text:style-name="P3" loext:marker-style-name="T42"><text:span text:style-name="T49"><text:s text:c="2"/>Root <text:s text:c="4"/>= A[1]</text:span><text:span text:style-name="T42"/></text:p>
          </table:table-cell>
        </table:table-row>
        <table:table-row table:style-name="表格53.1">
          <table:table-cell table:style-name="表格53.A1" office:value-type="string">
            <text:p text:style-name="P3" loext:marker-style-name="T42"><text:span text:style-name="T49"><text:s text:c="2"/>Parent(i) = A[⌊i/2⌋]</text:span><text:span text:style-name="T42"/></text:p>
          </table:table-cell>
        </table:table-row>
        <table:table-row table:style-name="表格53.1">
          <table:table-cell table:style-name="表格53.A1" office:value-type="string">
            <text:p text:style-name="P3" loext:marker-style-name="T42"><text:span text:style-name="T49"><text:s text:c="2"/>Left(i) <text:s/>= A[2i]</text:span><text:span text:style-name="T42"/></text:p>
          </table:table-cell>
        </table:table-row>
        <table:table-row table:style-name="表格53.1">
          <table:table-cell table:style-name="表格53.A1" office:value-type="string">
            <text:p text:style-name="P3" loext:marker-style-name="T42"><text:span text:style-name="T49"><text:s text:c="2"/>Right(i) = A[2i+1]</text:span><text:span text:style-name="T42"/></text:p>
          </table:table-cell>
        </table:table-row>
      </table:table>
      <text:p text:style-name="P1"/>
      <text:h text:style-name="P17" text:outline-level="2" loext:marker-style-name="T17"><text:span text:style-name="T18">時間複雜度速查</text:span><text:span text:style-name="T17"/></text:h>
      <text:p text:style-name="P1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33" loext:marker-style-name="T5"><text:span text:style-name="T6">操作</text:span><text:span text:style-name="T5"/></text:p>
            </table:table-cell>
            <table:table-cell table:style-name="表格54.A1" office:value-type="string">
              <text:p text:style-name="P33" loext:marker-style-name="T5"><text:span text:style-name="T6">時間複雜度</text:span><text:span text:style-name="T5"/></text:p>
            </table:table-cell>
            <table:table-cell table:style-name="表格54.A1" office:value-type="string">
              <text:p text:style-name="P33" loext:marker-style-name="T5"><text:span text:style-name="T6">原因</text:span><text:span text:style-name="T5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33" loext:marker-style-name="T42"><text:span text:style-name="T49">Insert</text:span><text:span text:style-name="T60">（</text:span><text:span text:style-name="T49">Bubble Up</text:span><text:span text:style-name="T60">）</text:span></text:p>
          </table:table-cell>
          <table:table-cell table:style-name="表格54.A2" office:value-type="string">
            <text:p text:style-name="P33" loext:marker-style-name="T42"><text:span text:style-name="T49">O(log n)</text:span><text:span text:style-name="T42"/></text:p>
          </table:table-cell>
          <table:table-cell table:style-name="表格54.A2" office:value-type="string">
            <text:p text:style-name="P33" loext:marker-style-name="T42"><text:span text:style-name="T60">最多走 </text:span><text:span text:style-name="T49">h = log n </text:span><text:span text:style-name="T60">層</text:span></text:p>
          </table:table-cell>
        </table:table-row>
        <table:table-row table:style-name="表格54.1">
          <table:table-cell table:style-name="表格54.A2" office:value-type="string">
            <text:p text:style-name="P33" loext:marker-style-name="T42"><text:span text:style-name="T49">Extract-Max</text:span><text:span text:style-name="T60">（</text:span><text:span text:style-name="T49">Heapify</text:span><text:span text:style-name="T60">）</text:span></text:p>
          </table:table-cell>
          <table:table-cell table:style-name="表格54.A2" office:value-type="string">
            <text:p text:style-name="P33" loext:marker-style-name="T42"><text:span text:style-name="T49">O(log n)</text:span><text:span text:style-name="T42"/></text:p>
          </table:table-cell>
          <table:table-cell table:style-name="表格54.A2" office:value-type="string">
            <text:p text:style-name="P33" loext:marker-style-name="T42"><text:span text:style-name="T60">最多走 </text:span><text:span text:style-name="T49">h = log n </text:span><text:span text:style-name="T60">層</text:span></text:p>
          </table:table-cell>
        </table:table-row>
        <table:table-row table:style-name="表格54.1">
          <table:table-cell table:style-name="表格54.A2" office:value-type="string">
            <text:p text:style-name="P33" loext:marker-style-name="T42"><text:span text:style-name="T49">Build Heap</text:span><text:span text:style-name="T60">（</text:span><text:span text:style-name="T49">Bottom-Up</text:span><text:span text:style-name="T60">）</text:span></text:p>
          </table:table-cell>
          <table:table-cell table:style-name="表格54.A2" office:value-type="string">
            <text:p text:style-name="P33" loext:marker-style-name="T42"><text:span text:style-name="T49">O(n) ★</text:span><text:span text:style-name="T42"/></text:p>
          </table:table-cell>
          <table:table-cell table:style-name="表格54.A2" office:value-type="string">
            <text:p text:style-name="P33" loext:marker-style-name="T42"><text:span text:style-name="T49">Floyd </text:span><text:span text:style-name="T60">演算法</text:span></text:p>
          </table:table-cell>
        </table:table-row>
        <table:table-row table:style-name="表格54.1">
          <table:table-cell table:style-name="表格54.A2" office:value-type="string">
            <text:p text:style-name="P33" loext:marker-style-name="T42"><text:span text:style-name="T60">逐個 </text:span><text:span text:style-name="T49">Insert </text:span><text:span text:style-name="T60">建 </text:span><text:span text:style-name="T49">Heap</text:span></text:p>
          </table:table-cell>
          <table:table-cell table:style-name="表格54.A2" office:value-type="string">
            <text:p text:style-name="P33" loext:marker-style-name="T42"><text:span text:style-name="T49">O(n log n)</text:span><text:span text:style-name="T42"/></text:p>
          </table:table-cell>
          <table:table-cell table:style-name="表格54.A2" office:value-type="string">
            <text:p text:style-name="P33" loext:marker-style-name="T42"><text:span text:style-name="T49">n </text:span><text:span text:style-name="T60">次 </text:span><text:span text:style-name="T49">× O(log n)</text:span></text:p>
          </table:table-cell>
        </table:table-row>
        <table:table-row table:style-name="表格54.1">
          <table:table-cell table:style-name="表格54.A2" office:value-type="string">
            <text:p text:style-name="P33" loext:marker-style-name="T42"><text:span text:style-name="T49">Heap Sort</text:span><text:span text:style-name="T42"/></text:p>
          </table:table-cell>
          <table:table-cell table:style-name="表格54.A2" office:value-type="string">
            <text:p text:style-name="P33" loext:marker-style-name="T42"><text:span text:style-name="T49">O(n log n)</text:span><text:span text:style-name="T42"/></text:p>
          </table:table-cell>
          <table:table-cell table:style-name="表格54.A2" office:value-type="string">
            <text:p text:style-name="P33" loext:marker-style-name="T42"><text:span text:style-name="T49">O(n) + O(n log n)</text:span><text:span text:style-name="T42"/></text:p>
          </table:table-cell>
        </table:table-row>
        <table:table-row table:style-name="表格54.1">
          <table:table-cell table:style-name="表格54.A2" office:value-type="string">
            <text:p text:style-name="P33" loext:marker-style-name="T42"><text:span text:style-name="T60">搜尋特定值</text:span><text:span text:style-name="T42"/></text:p>
          </table:table-cell>
          <table:table-cell table:style-name="表格54.A2" office:value-type="string">
            <text:p text:style-name="P33" loext:marker-style-name="T42"><text:span text:style-name="T49">O(n)</text:span><text:span text:style-name="T42"/></text:p>
          </table:table-cell>
          <table:table-cell table:style-name="表格54.A2" office:value-type="string">
            <text:p text:style-name="P33" loext:marker-style-name="T42"><text:span text:style-name="T60">無左右排序規則</text:span><text:span text:style-name="T42"/></text:p>
          </table:table-cell>
        </table:table-row>
        <table:table-row table:style-name="表格54.1">
          <table:table-cell table:style-name="表格54.A2" office:value-type="string">
            <text:p text:style-name="P33" loext:marker-style-name="T42"><text:span text:style-name="T49">Merge (Leftist Heap)</text:span><text:span text:style-name="T42"/></text:p>
          </table:table-cell>
          <table:table-cell table:style-name="表格54.A2" office:value-type="string">
            <text:p text:style-name="P33" loext:marker-style-name="T42"><text:span text:style-name="T49">O(log n + log m)</text:span><text:span text:style-name="T42"/></text:p>
          </table:table-cell>
          <table:table-cell table:style-name="表格54.A2" office:value-type="string">
            <text:p text:style-name="P33" loext:marker-style-name="T42"><text:span text:style-name="T60">右側路徑短</text:span><text:span text:style-name="T42"/></text:p>
          </table:table-cell>
        </table:table-row>
      </table:table>
      <text:p text:style-name="P1"/>
      <text:h text:style-name="P17" text:outline-level="2" loext:marker-style-name="T17"><text:span text:style-name="T27">Priority Queue </text:span><text:span text:style-name="T18">三種實作比較</text:span></text:h>
      <text:p text:style-name="P1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33" loext:marker-style-name="T5"><text:span text:style-name="T6">實作</text:span><text:span text:style-name="T5"/></text:p>
            </table:table-cell>
            <table:table-cell table:style-name="表格55.A1" office:value-type="string">
              <text:p text:style-name="P33" loext:marker-style-name="T5"><text:span text:style-name="T13">Insert</text:span><text:span text:style-name="T5"/></text:p>
            </table:table-cell>
            <table:table-cell table:style-name="表格55.A1" office:value-type="string">
              <text:p text:style-name="P33" loext:marker-style-name="T5"><text:span text:style-name="T13">Extract-Max</text:span><text:span text:style-name="T5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33" loext:marker-style-name="T42"><text:span text:style-name="T60">排序陣列</text:span><text:span text:style-name="T42"/></text:p>
          </table:table-cell>
          <table:table-cell table:style-name="表格55.A2" office:value-type="string">
            <text:p text:style-name="P33" loext:marker-style-name="T42"><text:span text:style-name="T49">O(n)</text:span><text:span text:style-name="T42"/></text:p>
          </table:table-cell>
          <table:table-cell table:style-name="表格55.A2" office:value-type="string">
            <text:p text:style-name="P33" loext:marker-style-name="T42"><text:span text:style-name="T49">O(1) <text:s/></text:span><text:span text:style-name="T60">取快插慢</text:span></text:p>
          </table:table-cell>
        </table:table-row>
        <table:table-row table:style-name="表格55.1">
          <table:table-cell table:style-name="表格55.A2" office:value-type="string">
            <text:p text:style-name="P33" loext:marker-style-name="T42"><text:span text:style-name="T60">未排序陣列</text:span><text:span text:style-name="T42"/></text:p>
          </table:table-cell>
          <table:table-cell table:style-name="表格55.A2" office:value-type="string">
            <text:p text:style-name="P33" loext:marker-style-name="T42"><text:span text:style-name="T49">O(1)</text:span><text:span text:style-name="T42"/></text:p>
          </table:table-cell>
          <table:table-cell table:style-name="表格55.A2" office:value-type="string">
            <text:p text:style-name="P33" loext:marker-style-name="T42"><text:span text:style-name="T49">O(n) <text:s/></text:span><text:span text:style-name="T60">插快取慢</text:span></text:p>
          </table:table-cell>
        </table:table-row>
        <table:table-row table:style-name="表格55.1">
          <table:table-cell table:style-name="表格55.A4" office:value-type="string">
            <text:p text:style-name="P33" loext:marker-style-name="T42"><text:span text:style-name="T49">Max Heap ★</text:span><text:span text:style-name="T42"/></text:p>
          </table:table-cell>
          <table:table-cell table:style-name="表格55.A4" office:value-type="string">
            <text:p text:style-name="P33" loext:marker-style-name="T42"><text:span text:style-name="T49">O(log n)</text:span><text:span text:style-name="T42"/></text:p>
          </table:table-cell>
          <table:table-cell table:style-name="表格55.A4" office:value-type="string">
            <text:p text:style-name="P33" loext:marker-style-name="T42"><text:span text:style-name="T49">O(log n) <text:s/></text:span><text:span text:style-name="T60">最均衡</text:span></text:p>
          </table:table-cell>
        </table:table-row>
      </table:table>
      <text:p text:style-name="P1"/>
      <text:h text:style-name="P17" text:outline-level="2" loext:marker-style-name="T17"><text:span text:style-name="T27">8 </text:span><text:span text:style-name="T18">句考試必背口訣</text:span></text:h>
      <text:p text:style-name="P1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3" loext:marker-style-name="T42"><text:span text:style-name="T49">1. <text:s/>Heap = Complete BT + Heap Property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2. <text:s/>parent = A[⌊i/2⌋]</text:span><text:span text:style-name="T42"/></text:p>
          </table:table-cell>
        </table:table-row>
        <text:soft-page-break/>
        <table:table-row table:style-name="表格56.1">
          <table:table-cell table:style-name="表格56.A1" office:value-type="string">
            <text:p text:style-name="P3" loext:marker-style-name="T42"><text:span text:style-name="T49">3. <text:s/>left child = A[2i]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4. <text:s/>right child = A[2i+1]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5. <text:s/>Insert → Bubble Up → O(log n)</text:span><text:span text:style-name="T42"/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6. <text:s/>Delete/Extract → Heapify</text:span><text:span text:style-name="T60">（</text:span><text:span text:style-name="T49">Bubble Down</text:span><text:span text:style-name="T60">）→ </text:span><text:span text:style-name="T49">O(log n)</text:span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7. <text:s/>Build Heap</text:span><text:span text:style-name="T60">（</text:span><text:span text:style-name="T49">Bottom-Up</text:span><text:span text:style-name="T60">）</text:span><text:span text:style-name="T49">= O(n) <text:s/>★ </text:span><text:span text:style-name="T60">非 </text:span><text:span text:style-name="T49">O(n log n)</text:span></text:p>
          </table:table-cell>
        </table:table-row>
        <table:table-row table:style-name="表格56.1">
          <table:table-cell table:style-name="表格56.A1" office:value-type="string">
            <text:p text:style-name="P3" loext:marker-style-name="T42"><text:span text:style-name="T49">8. <text:s/>Heap Sort = O(n log n)</text:span><text:span text:style-name="T60">，</text:span><text:span text:style-name="T49">In-place</text:span><text:span text:style-name="T60">，</text:span><text:span text:style-name="T49">Unstabl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Regular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1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3T00:14:26</meta:creation-date>
    <meta:initial-creator>Un-named</meta:initial-creator>
    <dc:language>en-US</dc:language>
    <dc:date>2026-06-25T16:51:29.080000000</dc:date>
    <meta:editing-cycles>254</meta:editing-cycles>
    <meta:editing-duration>P1DT4H6M58S</meta:editing-duration>
    <meta:generator>MODA_ODF_Application_Tools/3.8.4.2$Windows_X86_64 LibreOffice_project/4fb77107d5af14329e08085efe4fa19b5633383a</meta:generator>
    <meta:document-statistic meta:table-count="64" meta:image-count="0" meta:object-count="0" meta:page-count="33" meta:paragraph-count="906" meta:word-count="8853" meta:character-count="21034" meta:non-whitespace-character-count="14143"/>
    <meta:user-defined meta:name="AppVersion">15.0000</meta:user-defined>
  </office:meta>
</office:document-meta>
</file>