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5.875cm" fo:margin-left="0cm" fo:margin-top="0cm" fo:margin-bottom="0cm" table:align="left" style:writing-mode="page"/>
    </style:style>
    <style:style style:name="表格1.A" style:family="table-column">
      <style:table-column-properties style:column-width="15.875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" style:family="table">
      <style:table-properties style:width="15.875cm" fo:margin-left="0.004cm" fo:margin-top="0cm" fo:margin-bottom="0cm" table:align="left" style:writing-mode="page"/>
    </style:style>
    <style:style style:name="表格2.A" style:family="table-column">
      <style:table-column-properties style:column-width="3.524cm"/>
    </style:style>
    <style:style style:name="表格2.B" style:family="table-column">
      <style:table-column-properties style:column-width="5.295cm"/>
    </style:style>
    <style:style style:name="表格2.C" style:family="table-column">
      <style:table-column-properties style:column-width="7.056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3" style:family="table">
      <style:table-properties style:width="15.875cm" fo:margin-left="0cm" fo:margin-top="0cm" fo:margin-bottom="0cm" table:align="left" style:writing-mode="page"/>
    </style:style>
    <style:style style:name="表格3.A" style:family="table-column">
      <style:table-column-properties style:column-width="15.87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4" style:family="table">
      <style:table-properties style:width="15.875cm" fo:margin-left="0cm" fo:margin-top="0cm" fo:margin-bottom="0cm" table:align="left" style:writing-mode="page"/>
    </style:style>
    <style:style style:name="表格4.A" style:family="table-column">
      <style:table-column-properties style:column-width="15.875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" style:family="table">
      <style:table-properties style:width="15.875cm" fo:margin-left="0cm" fo:margin-top="0cm" fo:margin-bottom="0cm" table:align="left" style:writing-mode="page"/>
    </style:style>
    <style:style style:name="表格5.A" style:family="table-column">
      <style:table-column-properties style:column-width="15.875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6" style:family="table">
      <style:table-properties style:width="15.875cm" fo:margin-left="0cm" fo:margin-top="0cm" fo:margin-bottom="0cm" table:align="left" style:writing-mode="page"/>
    </style:style>
    <style:style style:name="表格6.A" style:family="table-column">
      <style:table-column-properties style:column-width="15.875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ce4d6" fo:padding-left="0.282cm" fo:padding-right="0.282cm" fo:padding-top="0.106cm" fo:padding-bottom="0.106cm" fo:border="none">
        <style:background-image/>
      </style:table-cell-properties>
    </style:style>
    <style:style style:name="表格7" style:family="table">
      <style:table-properties style:width="15.875cm" fo:margin-left="0cm" fo:margin-top="0cm" fo:margin-bottom="0cm" table:align="left" style:writing-mode="page"/>
    </style:style>
    <style:style style:name="表格7.A" style:family="table-column">
      <style:table-column-properties style:column-width="15.87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8" style:family="table">
      <style:table-properties style:width="15.875cm" fo:margin-left="0cm" fo:margin-top="0cm" fo:margin-bottom="0cm" table:align="left" style:writing-mode="page"/>
    </style:style>
    <style:style style:name="表格8.A" style:family="table-column">
      <style:table-column-properties style:column-width="15.875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9" style:family="table">
      <style:table-properties style:width="15.875cm" fo:margin-left="0cm" fo:margin-top="0cm" fo:margin-bottom="0cm" table:align="left" style:writing-mode="page"/>
    </style:style>
    <style:style style:name="表格9.A" style:family="table-column">
      <style:table-column-properties style:column-width="15.875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0" style:family="table">
      <style:table-properties style:width="15.875cm" fo:margin-left="0cm" fo:margin-top="0cm" fo:margin-bottom="0cm" table:align="left" style:writing-mode="page"/>
    </style:style>
    <style:style style:name="表格10.A" style:family="table-column">
      <style:table-column-properties style:column-width="15.875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1" style:family="table">
      <style:table-properties style:width="15.875cm" fo:margin-left="0cm" fo:margin-top="0cm" fo:margin-bottom="0cm" table:align="left" style:writing-mode="page"/>
    </style:style>
    <style:style style:name="表格11.A" style:family="table-column">
      <style:table-column-properties style:column-width="15.875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2" style:family="table">
      <style:table-properties style:width="15.875cm" fo:margin-left="0cm" fo:margin-top="0cm" fo:margin-bottom="0cm" table:align="left" style:writing-mode="page"/>
    </style:style>
    <style:style style:name="表格12.A" style:family="table-column">
      <style:table-column-properties style:column-width="15.875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3" style:family="table">
      <style:table-properties style:width="15.875cm" fo:margin-left="0cm" fo:margin-top="0cm" fo:margin-bottom="0cm" table:align="left" style:writing-mode="page"/>
    </style:style>
    <style:style style:name="表格13.A" style:family="table-column">
      <style:table-column-properties style:column-width="15.875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4" style:family="table">
      <style:table-properties style:width="15.875cm" fo:margin-left="0cm" fo:margin-top="0cm" fo:margin-bottom="0cm" table:align="left" style:writing-mode="page"/>
    </style:style>
    <style:style style:name="表格14.A" style:family="table-column">
      <style:table-column-properties style:column-width="15.87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5" style:family="table">
      <style:table-properties style:width="15.875cm" fo:margin-left="0cm" fo:margin-top="0cm" fo:margin-bottom="0cm" table:align="left" style:writing-mode="page"/>
    </style:style>
    <style:style style:name="表格15.A" style:family="table-column">
      <style:table-column-properties style:column-width="15.875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6" style:family="table">
      <style:table-properties style:width="15.875cm" fo:margin-left="0cm" fo:margin-top="0cm" fo:margin-bottom="0cm" table:align="left" style:writing-mode="page"/>
    </style:style>
    <style:style style:name="表格16.A" style:family="table-column">
      <style:table-column-properties style:column-width="15.87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7" style:family="table">
      <style:table-properties style:width="15.875cm" fo:margin-left="0cm" fo:margin-top="0cm" fo:margin-bottom="0cm" table:align="left" style:writing-mode="page"/>
    </style:style>
    <style:style style:name="表格17.A" style:family="table-column">
      <style:table-column-properties style:column-width="15.875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8" style:family="table">
      <style:table-properties style:width="15.875cm" fo:margin-left="0cm" fo:margin-top="0cm" fo:margin-bottom="0cm" table:align="left" style:writing-mode="page"/>
    </style:style>
    <style:style style:name="表格18.A" style:family="table-column">
      <style:table-column-properties style:column-width="15.875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9" style:family="table">
      <style:table-properties style:width="15.875cm" fo:margin-left="0.004cm" fo:margin-top="0cm" fo:margin-bottom="0cm" table:align="left" style:writing-mode="page"/>
    </style:style>
    <style:style style:name="表格19.A" style:family="table-column">
      <style:table-column-properties style:column-width="5.292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9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0" style:family="table">
      <style:table-properties style:width="15.875cm" fo:margin-left="0cm" fo:margin-top="0cm" fo:margin-bottom="0cm" table:align="left" style:writing-mode="page"/>
    </style:style>
    <style:style style:name="表格20.A" style:family="table-column">
      <style:table-column-properties style:column-width="15.87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1" style:family="table">
      <style:table-properties style:width="15.875cm" fo:margin-left="0cm" fo:margin-top="0cm" fo:margin-bottom="0cm" table:align="left" style:writing-mode="page"/>
    </style:style>
    <style:style style:name="表格21.A" style:family="table-column">
      <style:table-column-properties style:column-width="15.87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2" style:family="table">
      <style:table-properties style:width="15.875cm" fo:margin-left="0cm" fo:margin-top="0cm" fo:margin-bottom="0cm" table:align="left" style:writing-mode="page"/>
    </style:style>
    <style:style style:name="表格22.A" style:family="table-column">
      <style:table-column-properties style:column-width="15.87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3" style:family="table">
      <style:table-properties style:width="15.875cm" fo:margin-left="0.004cm" fo:margin-top="0cm" fo:margin-bottom="0cm" table:align="left" style:writing-mode="page"/>
    </style:style>
    <style:style style:name="表格23.A" style:family="table-column">
      <style:table-column-properties style:column-width="5.292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3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3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4" style:family="table">
      <style:table-properties style:width="15.875cm" fo:margin-left="0cm" fo:margin-top="0cm" fo:margin-bottom="0cm" table:align="left" style:writing-mode="page"/>
    </style:style>
    <style:style style:name="表格24.A" style:family="table-column">
      <style:table-column-properties style:column-width="15.87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5" style:family="table">
      <style:table-properties style:width="15.875cm" fo:margin-left="0cm" fo:margin-top="0cm" fo:margin-bottom="0cm" table:align="left" style:writing-mode="page"/>
    </style:style>
    <style:style style:name="表格25.A" style:family="table-column">
      <style:table-column-properties style:column-width="15.875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6" style:family="table">
      <style:table-properties style:width="15.921cm" fo:margin-left="0.071cm" fo:margin-top="0cm" fo:margin-bottom="0cm" table:align="left" style:writing-mode="page"/>
    </style:style>
    <style:style style:name="表格26.A" style:family="table-column">
      <style:table-column-properties style:column-width="15.92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27" style:family="table">
      <style:table-properties style:width="15.921cm" fo:margin-left="0.071cm" fo:margin-top="0cm" fo:margin-bottom="0cm" table:align="left" style:writing-mode="page"/>
    </style:style>
    <style:style style:name="表格27.A" style:family="table-column">
      <style:table-column-properties style:column-width="15.92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28" style:family="table">
      <style:table-properties style:width="15.921cm" fo:margin-left="0.071cm" fo:margin-top="0cm" fo:margin-bottom="0cm" table:align="left" style:writing-mode="page"/>
    </style:style>
    <style:style style:name="表格28.A" style:family="table-column">
      <style:table-column-properties style:column-width="15.92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29" style:family="table">
      <style:table-properties style:width="15.921cm" fo:margin-left="0.071cm" fo:margin-top="0cm" fo:margin-bottom="0cm" table:align="left" style:writing-mode="page"/>
    </style:style>
    <style:style style:name="表格29.A" style:family="table-column">
      <style:table-column-properties style:column-width="15.92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30" style:family="table">
      <style:table-properties style:width="15.875cm" fo:margin-left="0cm" fo:margin-top="0cm" fo:margin-bottom="0cm" table:align="left" style:writing-mode="page"/>
    </style:style>
    <style:style style:name="表格30.A" style:family="table-column">
      <style:table-column-properties style:column-width="15.875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31" style:family="table">
      <style:table-properties style:width="15.875cm" fo:margin-left="0cm" fo:margin-top="0cm" fo:margin-bottom="0cm" table:align="left" style:writing-mode="page"/>
    </style:style>
    <style:style style:name="表格31.A" style:family="table-column">
      <style:table-column-properties style:column-width="15.875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2" style:family="table">
      <style:table-properties style:width="15.875cm" fo:margin-left="0cm" fo:margin-top="0cm" fo:margin-bottom="0cm" table:align="left" style:writing-mode="page"/>
    </style:style>
    <style:style style:name="表格32.A" style:family="table-column">
      <style:table-column-properties style:column-width="15.875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3" style:family="table">
      <style:table-properties style:width="15.875cm" fo:margin-left="0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34" style:family="table">
      <style:table-properties style:width="15.875cm" fo:margin-left="0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5" style:family="table">
      <style:table-properties style:width="15.875cm" fo:margin-left="0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6" style:family="table">
      <style:table-properties style:width="15.875cm" fo:margin-left="0cm" fo:margin-top="0cm" fo:margin-bottom="0cm" table:align="left" style:writing-mode="page"/>
    </style:style>
    <style:style style:name="表格36.A" style:family="table-column">
      <style:table-column-properties style:column-width="15.875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7" style:family="table">
      <style:table-properties style:width="15.875cm" fo:margin-left="0cm" fo:margin-top="0cm" fo:margin-bottom="0cm" table:align="left" style:writing-mode="page"/>
    </style:style>
    <style:style style:name="表格37.A" style:family="table-column">
      <style:table-column-properties style:column-width="15.87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8" style:family="table">
      <style:table-properties style:width="15.875cm" fo:margin-left="0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39" style:family="table">
      <style:table-properties style:width="15.921cm" fo:margin-left="0.009cm" fo:margin-top="0cm" fo:margin-bottom="0cm" table:align="left" style:writing-mode="page"/>
    </style:style>
    <style:style style:name="表格39.A" style:family="table-column">
      <style:table-column-properties style:column-width="4.41cm"/>
    </style:style>
    <style:style style:name="表格39.B" style:family="table-column">
      <style:table-column-properties style:column-width="3.528cm"/>
    </style:style>
    <style:style style:name="表格39.C" style:family="table-column">
      <style:table-column-properties style:column-width="3.524cm"/>
    </style:style>
    <style:style style:name="表格39.D" style:family="table-column">
      <style:table-column-properties style:column-width="4.459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39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39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0" style:family="table">
      <style:table-properties style:width="15.921cm" fo:margin-left="0.071cm" fo:margin-top="0cm" fo:margin-bottom="0cm" table:align="left" style:writing-mode="page"/>
    </style:style>
    <style:style style:name="表格40.A" style:family="table-column">
      <style:table-column-properties style:column-width="15.92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1" style:family="table">
      <style:table-properties style:width="15.921cm" fo:margin-left="0.071cm" fo:margin-top="0cm" fo:margin-bottom="0cm" table:align="left" style:writing-mode="page"/>
    </style:style>
    <style:style style:name="表格41.A" style:family="table-column">
      <style:table-column-properties style:column-width="15.92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2" style:family="table">
      <style:table-properties style:width="15.921cm" fo:margin-left="0.071cm" fo:margin-top="0cm" fo:margin-bottom="0cm" table:align="left" style:writing-mode="page"/>
    </style:style>
    <style:style style:name="表格42.A" style:family="table-column">
      <style:table-column-properties style:column-width="15.92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3" style:family="table">
      <style:table-properties style:width="15.921cm" fo:margin-left="0.071cm" fo:margin-top="0cm" fo:margin-bottom="0cm" table:align="left" style:writing-mode="page"/>
    </style:style>
    <style:style style:name="表格43.A" style:family="table-column">
      <style:table-column-properties style:column-width="15.92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4" style:family="table">
      <style:table-properties style:width="15.921cm" fo:margin-left="0.071cm" fo:margin-top="0cm" fo:margin-bottom="0cm" table:align="left" style:writing-mode="page"/>
    </style:style>
    <style:style style:name="表格44.A" style:family="table-column">
      <style:table-column-properties style:column-width="15.92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5" style:family="table">
      <style:table-properties style:width="15.921cm" fo:margin-left="0.071cm" fo:margin-top="0cm" fo:margin-bottom="0cm" table:align="left" style:writing-mode="page"/>
    </style:style>
    <style:style style:name="表格45.A" style:family="table-column">
      <style:table-column-properties style:column-width="15.92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6" style:family="table">
      <style:table-properties style:width="15.921cm" fo:margin-left="0.071cm" fo:margin-top="0cm" fo:margin-bottom="0cm" table:align="left" style:writing-mode="page"/>
    </style:style>
    <style:style style:name="表格46.A" style:family="table-column">
      <style:table-column-properties style:column-width="15.92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47" style:family="table">
      <style:table-properties style:width="15.921cm" fo:margin-left="0.009cm" fo:margin-top="0cm" fo:margin-bottom="0cm" table:align="left" style:writing-mode="page"/>
    </style:style>
    <style:style style:name="表格47.A" style:family="table-column">
      <style:table-column-properties style:column-width="4.935cm"/>
    </style:style>
    <style:style style:name="表格47.B" style:family="table-column">
      <style:table-column-properties style:column-width="5.472cm"/>
    </style:style>
    <style:style style:name="表格47.C" style:family="table-column">
      <style:table-column-properties style:column-width="5.514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47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47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8" style:family="table">
      <style:table-properties style:width="15.921cm" fo:margin-left="0.071cm" fo:margin-top="0cm" fo:margin-bottom="0cm" table:align="left" style:writing-mode="page"/>
    </style:style>
    <style:style style:name="表格48.A" style:family="table-column">
      <style:table-column-properties style:column-width="15.92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9" style:family="table">
      <style:table-properties style:width="15.875cm" fo:margin-left="0.004cm" fo:margin-top="0cm" fo:margin-bottom="0cm" table:align="left" style:writing-mode="page"/>
    </style:style>
    <style:style style:name="表格49.A" style:family="table-column">
      <style:table-column-properties style:column-width="3.969cm"/>
    </style:style>
    <style:style style:name="表格49.C" style:family="table-column">
      <style:table-column-properties style:column-width="7.938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4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0" style:family="table">
      <style:table-properties style:width="15.875cm" fo:margin-left="0.004cm" fo:margin-top="0cm" fo:margin-bottom="0cm" table:align="left" style:writing-mode="page"/>
    </style:style>
    <style:style style:name="表格50.A" style:family="table-column">
      <style:table-column-properties style:column-width="3.969cm"/>
    </style:style>
    <style:style style:name="表格50.1" style:family="table-row">
      <style:table-row-properties fo:keep-together="auto"/>
    </style:style>
    <style:style style:name="表格50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0.A2" style:family="table-cell">
      <style:table-cell-properties style:vertical-align="middle" fo:background-color="#ffffff" fo:padding-left="0.212cm" fo:padding-right="0.212cm" fo:padding-top="0.141cm" fo:padding-bottom="0.141cm" fo:border="0.25pt solid #9dc3e6">
        <style:background-image/>
      </style:table-cell-properties>
    </style:style>
    <style:style style:name="表格50.A3" style:family="table-cell">
      <style:table-cell-properties style:vertical-align="middle" fo:background-color="#ebf3fb" fo:padding-left="0.212cm" fo:padding-right="0.212cm" fo:padding-top="0.141cm" fo:padding-bottom="0.141cm" fo:border="0.25pt solid #9dc3e6">
        <style:background-image/>
      </style:table-cell-properties>
    </style:style>
    <style:style style:name="表格51" style:family="table">
      <style:table-properties style:width="15.875cm" fo:margin-left="0cm" fo:margin-top="0cm" fo:margin-bottom="0cm" table:align="left" style:writing-mode="page"/>
    </style:style>
    <style:style style:name="表格51.A" style:family="table-column">
      <style:table-column-properties style:column-width="15.875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52" style:family="table">
      <style:table-properties style:width="15.875cm" fo:margin-left="0cm" fo:margin-top="0cm" fo:margin-bottom="0cm" table:align="left" style:writing-mode="page"/>
    </style:style>
    <style:style style:name="表格52.A" style:family="table-column">
      <style:table-column-properties style:column-width="15.875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53" style:family="table">
      <style:table-properties style:width="15.875cm" fo:margin-left="0cm" fo:margin-top="0cm" fo:margin-bottom="0cm" table:align="left" style:writing-mode="page"/>
    </style:style>
    <style:style style:name="表格53.A" style:family="table-column">
      <style:table-column-properties style:column-width="15.875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4" style:family="table">
      <style:table-properties style:width="15.875cm" fo:margin-left="0.004cm" fo:margin-top="0cm" fo:margin-bottom="0cm" table:align="left" style:writing-mode="page"/>
    </style:style>
    <style:style style:name="表格54.A" style:family="table-column">
      <style:table-column-properties style:column-width="5.292cm"/>
    </style:style>
    <style:style style:name="表格54.B" style:family="table-column">
      <style:table-column-properties style:column-width="3.528cm"/>
    </style:style>
    <style:style style:name="表格54.C" style:family="table-column">
      <style:table-column-properties style:column-width="7.056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4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5" style:family="table">
      <style:table-properties style:width="15.875cm" fo:margin-left="0.004cm" fo:margin-top="0cm" fo:margin-bottom="0cm" table:align="left" style:writing-mode="page"/>
    </style:style>
    <style:style style:name="表格55.A" style:family="table-column">
      <style:table-column-properties style:column-width="5.292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5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5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56" style:family="table">
      <style:table-properties style:width="15.875cm" fo:margin-left="0cm" fo:margin-top="0cm" fo:margin-bottom="0cm" table:align="left" style:writing-mode="page"/>
    </style:style>
    <style:style style:name="表格56.A" style:family="table-column">
      <style:table-column-properties style:column-width="15.875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P1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141cm" style:contextual-spacing="false" fo:text-align="center" style:justify-single-word="false" fo:padding-left="0cm" fo:padding-right="0cm" fo:padding-top="0cm" fo:padding-bottom="0.212cm" fo:border-left="none" fo:border-right="none" fo:border-top="none" fo:border-bottom="1.5pt solid #2e75b6"/>
    </style:style>
    <style:style style:name="P3" style:family="paragraph" style:parent-style-name="Standard">
      <style:paragraph-properties fo:margin-top="0.071cm" fo:margin-bottom="0.071cm" style:contextual-spacing="false"/>
    </style:style>
    <style:style style:name="P4" style:family="paragraph" style:parent-style-name="Heading_20_1">
      <style:paragraph-properties fo:margin-left="0cm" fo:margin-right="0cm" fo:margin-top="0.529cm" fo:margin-bottom="0.212cm" style:contextual-spacing="false" fo:text-indent="0cm" style:auto-text-indent="false" fo:padding-left="0cm" fo:padding-right="0cm" fo:padding-top="0cm" fo:padding-bottom="0.141cm" fo:border-left="none" fo:border-right="none" fo:border-top="none" fo:border-bottom="0.99pt solid #2e75b6"/>
    </style:style>
    <style:style style:name="P5" style:family="paragraph" style:parent-style-name="Standard">
      <style:paragraph-properties fo:margin-top="0.106cm" fo:margin-bottom="0.106cm" style:contextual-spacing="false"/>
    </style:style>
    <style:style style:name="P6" style:family="paragraph" style:parent-style-name="Heading_20_2">
      <style:paragraph-properties fo:margin-left="0cm" fo:margin-right="0cm" fo:margin-top="0.423cm" fo:margin-bottom="0.141cm" style:contextual-spacing="false" fo:text-indent="0cm" style:auto-text-indent="false"/>
    </style:style>
    <style:style style:name="P7" style:family="paragraph" style:parent-style-name="List_20_Paragraph" style:list-style-name="WWNum5">
      <style:paragraph-properties fo:margin-left="1.27cm" fo:margin-right="0cm" fo:margin-top="0.071cm" fo:margin-bottom="0.071cm" style:contextual-spacing="false" fo:text-indent="-0.635cm" style:auto-text-indent="false"/>
    </style:style>
    <style:style style:name="P8" style:family="paragraph" style:parent-style-name="List_20_Paragraph" style:list-style-name="WWNum6">
      <style:paragraph-properties fo:margin-left="1.27cm" fo:margin-right="0cm" fo:margin-top="0.071cm" fo:margin-bottom="0.071cm" style:contextual-spacing="false" fo:text-indent="-0.635cm" style:auto-text-indent="false"/>
    </style:style>
    <style:style style:name="P9" style:family="paragraph" style:parent-style-name="Standard">
      <style:paragraph-properties fo:margin-top="0.053cm" fo:margin-bottom="0.053cm" style:contextual-spacing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List_20_Paragraph" style:list-style-name="WWNum7">
      <style:paragraph-properties fo:margin-left="1.27cm" fo:margin-right="0cm" fo:margin-top="0.071cm" fo:margin-bottom="0.071cm" style:contextual-spacing="false" fo:text-indent="-0.635cm" style:auto-text-indent="false"/>
    </style:style>
    <style:style style:name="P12" style:family="paragraph" style:parent-style-name="List_20_Paragraph" style:list-style-name="WWNum8">
      <style:paragraph-properties fo:margin-left="1.27cm" fo:margin-right="0cm" fo:margin-top="0.071cm" fo:margin-bottom="0.071cm" style:contextual-spacing="false" fo:text-indent="-0.635cm" style:auto-text-indent="false"/>
    </style:style>
    <style:style style:name="P13" style:family="paragraph" style:parent-style-name="List_20_Paragraph" style:list-style-name="WWNum9">
      <style:paragraph-properties fo:margin-left="1.27cm" fo:margin-right="0cm" fo:margin-top="0.071cm" fo:margin-bottom="0.071cm" style:contextual-spacing="false" fo:text-indent="-0.635cm" style:auto-text-indent="false"/>
    </style:style>
    <style:style style:name="P14" style:family="paragraph" style:parent-style-name="Standard">
      <style:paragraph-properties fo:margin-top="0.318cm" fo:margin-bottom="0.106cm" style:contextual-spacing="false"/>
    </style:style>
    <style:style style:name="P15" style:family="paragraph" style:parent-style-name="List_20_Paragraph" style:list-style-name="WWNum10">
      <style:paragraph-properties fo:margin-left="1.27cm" fo:margin-right="0cm" fo:margin-top="0.071cm" fo:margin-bottom="0.071cm" style:contextual-spacing="false" fo:text-indent="-0.635cm" style:auto-text-indent="false"/>
    </style:style>
    <style:style style:name="P16" style:family="paragraph" style:parent-style-name="List_20_Paragraph" style:list-style-name="WWNum11">
      <style:paragraph-properties fo:margin-left="1.27cm" fo:margin-right="0cm" fo:margin-top="0.071cm" fo:margin-bottom="0.071cm" style:contextual-spacing="false" fo:text-indent="-0.635cm" style:auto-text-indent="false"/>
    </style:style>
    <style:style style:name="P17" style:family="paragraph" style:parent-style-name="List_20_Paragraph" style:list-style-name="WWNum12">
      <style:paragraph-properties fo:margin-left="1.27cm" fo:margin-right="0cm" fo:margin-top="0.071cm" fo:margin-bottom="0.071cm" style:contextual-spacing="false" fo:text-indent="-0.635cm" style:auto-text-indent="false"/>
    </style:style>
    <style:style style:name="P18" style:family="paragraph" style:parent-style-name="List_20_Paragraph" style:list-style-name="WWNum13">
      <style:paragraph-properties fo:margin-left="1.27cm" fo:margin-right="0cm" fo:margin-top="0.071cm" fo:margin-bottom="0.071cm" style:contextual-spacing="false" fo:text-indent="-0.635cm" style:auto-text-indent="false"/>
    </style:style>
    <style:style style:name="P19" style:family="paragraph" style:parent-style-name="Standard" style:list-style-name="WWNum2">
      <style:paragraph-properties fo:margin-top="0.071cm" fo:margin-bottom="0.071cm" style:contextual-spacing="false"/>
    </style:style>
    <style:style style:name="P20" style:family="paragraph" style:parent-style-name="Heading_20_1">
      <style:paragraph-properties fo:margin-left="0cm" fo:margin-top="0.847cm" fo:margin-bottom="0.353cm" style:contextual-spacing="false" fo:text-indent="0cm" style:auto-text-indent="false" fo:padding="0cm" fo:border-left="none" fo:border-right="none" fo:border-top="none" fo:border-bottom="2.01pt solid #2e75b6"/>
    </style:style>
    <style:style style:name="P21" style:family="paragraph" style:parent-style-name="Heading_20_2">
      <style:paragraph-properties fo:margin-left="0cm" fo:margin-top="0.529cm" fo:margin-bottom="0.247cm" style:contextual-spacing="false" fo:text-indent="0cm" style:auto-text-indent="false"/>
    </style:style>
    <style:style style:name="P22" style:family="paragraph" style:parent-style-name="Standard">
      <style:paragraph-properties fo:margin-top="0cm" fo:margin-bottom="0.212cm" style:contextual-spacing="false"/>
    </style:style>
    <style:style style:name="P23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</style:style>
    <style:style style:name="P24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</style:style>
    <style:style style:name="P25" style:family="paragraph" style:parent-style-name="Standard">
      <loext:graphic-properties draw:fill="solid" draw:fill-color="#f4f6f9"/>
      <style:paragraph-properties fo:margin-left="0.494cm" fo:margin-right="0.353cm" fo:margin-top="0cm" fo:margin-bottom="0.141cm" style:contextual-spacing="false" fo:text-indent="0cm" style:auto-text-indent="false" fo:background-color="#f4f6f9" fo:padding="0cm" fo:border-left="4pt solid #2e75b6" fo:border-right="0.51pt solid #bbbbbb" fo:border-top="none" fo:border-bottom="0.51pt solid #bbbbbb" style:shadow="none"/>
    </style:style>
    <style:style style:name="P26" style:family="paragraph" style:parent-style-name="Standard">
      <style:paragraph-properties fo:margin-top="0cm" fo:margin-bottom="0.141cm" style:contextual-spacing="false"/>
    </style:style>
    <style:style style:name="P27" style:family="paragraph" style:parent-style-name="List_20_Paragraph" style:list-style-name="WWNum14">
      <style:paragraph-properties fo:margin-top="0cm" fo:margin-bottom="0.141cm" style:contextual-spacing="false"/>
    </style:style>
    <style:style style:name="P28" style:family="paragraph" style:parent-style-name="Standard">
      <style:paragraph-properties fo:margin-top="0cm" fo:margin-bottom="0cm" style:contextual-spacing="false"/>
    </style:style>
    <style:style style:name="P29" style:family="paragraph" style:parent-style-name="Standard">
      <style:paragraph-properties fo:margin-top="0cm" fo:margin-bottom="0.282cm" style:contextual-spacing="false"/>
    </style:style>
    <style:style style:name="P30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P31" style:family="paragraph" style:parent-style-name="Heading_20_2">
      <style:paragraph-properties fo:margin-left="0cm" fo:margin-top="0.423cm" fo:margin-bottom="0.141cm" style:contextual-spacing="false" fo:text-indent="0cm" style:auto-text-indent="false"/>
    </style:style>
    <style:style style:name="P32" style:family="paragraph" style:parent-style-name="Standard">
      <style:paragraph-properties fo:margin-top="0.053cm" fo:margin-bottom="0.053cm" style:contextual-spacing="false"/>
      <style:text-properties fo:color="#ff3d00" loext:opacity="100%" fo:font-weight="bold" fo:background-color="#64ffda" style:font-weight-asian="bold" style:font-weight-complex="bold"/>
    </style:style>
    <style:style style:name="P33" style:family="paragraph" style:parent-style-name="Standard">
      <style:paragraph-properties fo:margin-top="0.353cm" fo:margin-bottom="0.176cm" style:contextual-spacing="false"/>
    </style:style>
    <style:style style:name="P34" style:family="paragraph" style:parent-style-name="Standard">
      <style:paragraph-properties fo:margin-top="0cm" fo:margin-bottom="0.071cm" style:contextual-spacing="false"/>
    </style:style>
    <style:style style:name="P35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P36" style:family="paragraph" style:parent-style-name="Heading_20_1">
      <style:paragraph-properties fo:margin-left="0cm" fo:margin-top="0.847cm" fo:margin-bottom="0.353cm" style:contextual-spacing="false" fo:text-indent="0cm" style:auto-text-indent="false" fo:padding="0cm" fo:border-left="none" fo:border-right="none" fo:border-top="none" fo:border-bottom="2.01pt solid #2e75b6"/>
      <style:text-properties fo:color="#1f3864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" style:family="text">
      <style:text-properties fo:color="#1f4e79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2" style:family="text">
      <style:text-properties fo:color="#1f4e79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3" style:family="text">
      <style:text-properties fo:color="#1f4e79" loext:opacity="100%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4" style:family="text">
      <style:text-properties fo:color="#2e75b6" loext:opacity="100%" style:font-name="Arial1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5" style:family="text">
      <style:text-properties fo:color="#2e75b6" loext:opacity="100%" style:font-name="Arial1" fo:font-size="11pt" fo:font-style="italic" style:font-size-asian="11pt" style:font-style-asian="italic" style:font-name-complex="Arial2" style:font-size-complex="11pt" style:font-style-complex="italic"/>
    </style:style>
    <style:style style:name="T6" style:family="text">
      <style:text-properties fo:color="#2e75b6" loext:opacity="100%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7" style:family="text">
      <style:text-properties fo:color="#1f4e79" loext:opacity="100%" style:font-name="Arial1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8" style:family="text">
      <style:text-properties fo:color="#1f4e79" loext:opacity="100%" style:font-name="Arial1" fo:font-size="16pt" fo:font-weight="bold" style:font-size-asian="16pt" style:font-weight-asian="bold" style:font-name-complex="Arial2" style:font-size-complex="16pt" style:font-weight-complex="bold"/>
    </style:style>
    <style:style style:name="T9" style:family="text">
      <style:text-properties fo:color="#1f4e79" loext:opacity="100%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10" style:family="text">
      <style:text-properties fo:color="#595959" loext:opacity="100%" style:font-name="Arial1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1" style:family="text">
      <style:text-properties fo:color="#595959" loext:opacity="100%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2" style:family="text">
      <style:text-properties fo:color="#595959" loext:opacity="100%" style:font-name="Arial1" fo:font-size="11pt" fo:font-style="normal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3" style:family="text">
      <style:text-properties fo:color="#2e75b6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4" style:family="text">
      <style:text-properties fo:color="#2e75b6" loext:opacity="100%" style:font-name="Arial1" fo:font-size="13pt" fo:font-weight="bold" style:font-size-asian="13pt" style:font-weight-asian="bold" style:font-name-complex="Arial2" style:font-size-complex="13pt" style:font-weight-complex="bold"/>
    </style:style>
    <style:style style:name="T15" style:family="text">
      <style:text-properties fo:color="#2e75b6" loext:opacity="100%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6" style:family="text">
      <style:text-properties fo:color="#595959" loext:opacity="100%" style:font-name="Arial1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17" style:family="text">
      <style:text-properties fo:color="#00e676" loext:opacity="100%" style:font-name="Arial1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18" style:family="text">
      <style:text-properties fo:color="#595959" loext:opacity="100%" style:font-name="Arial1" fo:font-size="10.5pt" fo:font-weight="normal" style:font-size-asian="10.5pt" style:font-weight-asian="normal" style:font-name-complex="Arial2" style:font-size-complex="10.5pt" style:font-weight-complex="normal"/>
    </style:style>
    <style:style style:name="T19" style:family="text">
      <style:text-properties fo:color="#595959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20" style:family="text">
      <style:text-properties fo:color="#ff5252" loext:opacity="100%" style:font-name="Arial1" fo:font-size="10.5pt" fo:font-weight="bold" fo:background-color="#ffebee" loext:char-shading-value="0" style:font-size-asian="10.5pt" style:font-weight-asian="bold" style:font-name-complex="Arial2" style:font-size-complex="10.5pt" style:font-weight-complex="bold"/>
    </style:style>
    <style:style style:name="T21" style:family="text">
      <style:text-properties fo:color="#18ffff" loext:opacity="100%" style:font-name="Arial1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22" style:family="text">
      <style:text-properties fo:color="#595959" loext:opacity="100%" style:font-name="Arial1" fo:font-size="10.5pt" style:font-name-asian="Arial2" style:font-size-asian="10.5pt" style:font-name-complex="Arial2" style:font-size-complex="10.5pt"/>
    </style:style>
    <style:style style:name="T23" style:family="text">
      <style:text-properties fo:color="#595959" loext:opacity="100%" fo:font-size="10.5pt" style:font-name-asian="Arial2" style:font-size-asian="10.5pt" style:font-name-complex="Arial2" style:font-size-complex="10.5pt"/>
    </style:style>
    <style:style style:name="T24" style:family="text">
      <style:text-properties fo:color="#595959" loext:opacity="100%" style:font-name="Arial1" fo:font-size="10.5pt" style:font-size-asian="10.5pt" style:font-name-complex="Arial2" style:font-size-complex="10.5pt"/>
    </style:style>
    <style:style style:name="T25" style:family="text">
      <style:text-properties fo:color="#595959" loext:opacity="100%" style:font-name="Arial1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26" style:family="text">
      <style:text-properties fo:color="#595959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27" style:family="text">
      <style:text-properties fo:color="#1f4e79" loext:opacity="100%" style:font-name="Arial1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28" style:family="text">
      <style:text-properties fo:color="#1f4e79" loext:opacity="100%" style:font-name="Arial1" fo:font-size="10.5pt" fo:font-weight="bold" style:font-size-asian="10.5pt" style:font-weight-asian="bold" style:font-name-complex="Arial2" style:font-size-complex="10.5pt" style:font-weight-complex="bold"/>
    </style:style>
    <style:style style:name="T29" style:family="text">
      <style:text-properties fo:color="#76ff03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30" style:family="text">
      <style:text-properties fo:color="#595959" loext:opacity="100%" style:font-name="Arial1" fo:font-size="10.5pt" fo:font-weight="bold" fo:background-color="#76ff03" loext:char-shading-value="0" style:font-size-asian="10.5pt" style:font-weight-asian="bold" style:font-name-complex="Arial2" style:font-size-complex="10.5pt" style:font-weight-complex="bold"/>
    </style:style>
    <style:style style:name="T31" style:family="text">
      <style:text-properties fo:color="#ff1744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32" style:family="text">
      <style:text-properties fo:color="#595959" loext:opacity="100%" style:font-name="Arial1" fo:font-size="10.5pt" fo:font-weight="bold" fo:background-color="#ff1744" loext:char-shading-value="0" style:font-size-asian="10.5pt" style:font-weight-asian="bold" style:font-name-complex="Arial2" style:font-size-complex="10.5pt" style:font-weight-complex="bold"/>
    </style:style>
    <style:style style:name="T33" style:family="text">
      <style:text-properties fo:color="#64ffda" loext:opacity="100%" fo:font-size="10.5pt" fo:font-weight="bold" fo:background-color="#6d4c41" loext:char-shading-value="0" style:font-name-asian="Arial2" style:font-size-asian="10.5pt" style:font-weight-asian="bold" style:font-name-complex="Arial2" style:font-size-complex="10.5pt" style:font-weight-complex="bold"/>
    </style:style>
    <style:style style:name="T34" style:family="text">
      <style:text-properties fo:color="#ffd740" loext:opacity="100%" fo:font-size="11pt" fo:font-style="normal" fo:font-weight="bold" fo:background-color="#000000" loext:char-shading-value="0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35" style:family="text">
      <style:text-properties fo:color="#ffd740" loext:opacity="100%" style:font-name="Arial1" fo:font-size="11pt" fo:font-style="normal" fo:font-weight="bold" fo:background-color="#000000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36" style:family="text">
      <style:text-properties fo:color="#ff4081" loext:opacity="100%" style:font-name="Arial1" fo:font-size="11pt" fo:font-style="normal" fo:font-weight="bold" fo:background-color="#fce4ec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37" style:family="text">
      <style:text-properties fo:color="#c6ff00" loext:opacity="100%" fo:font-size="10.5pt" fo:font-weight="bold" fo:background-color="#ff4081" loext:char-shading-value="0" style:font-name-asian="Arial2" style:font-size-asian="10.5pt" style:font-weight-asian="bold" style:font-name-complex="Arial2" style:font-size-complex="10.5pt" style:font-weight-complex="bold"/>
    </style:style>
    <style:style style:name="T38" style:family="text">
      <style:text-properties fo:color="#18ffff" loext:opacity="100%" fo:font-size="10.5pt" fo:font-weight="bold" fo:background-color="#d500f9" loext:char-shading-value="0" style:font-name-asian="Arial2" style:font-size-asian="10.5pt" style:font-weight-asian="bold" style:font-name-complex="Arial2" style:font-size-complex="10.5pt" style:font-weight-complex="bold"/>
    </style:style>
    <style:style style:name="T39" style:family="text">
      <style:text-properties fo:color="#ffd74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40" style:family="text">
      <style:text-properties fo:color="#76ff03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41" style:family="text">
      <style:text-properties fo:color="#ff9100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42" style:family="text">
      <style:text-properties fo:color="#18ffff" loext:opacity="100%" style:font-name="Arial1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43" style:family="text">
      <style:text-properties fo:color="#595959" loext:opacity="100%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44" style:family="text">
      <style:text-properties fo:color="#ff3d00" loext:opacity="100%" style:font-name="Arial1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45" style:family="text">
      <style:text-properties fo:color="#c6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46" style:family="text">
      <style:text-properties fo:color="#1f4e79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47" style:family="text">
      <style:text-properties fo:color="#1f4e7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48" style:family="text">
      <style:text-properties fo:color="#1f4e79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49" style:family="text">
      <style:text-properties fo:color="#595959" loext:opacity="100%" fo:font-size="10.5pt" fo:font-weight="bold" fo:background-color="#76ff03" loext:char-shading-value="0" style:font-name-asian="Arial2" style:font-size-asian="10.5pt" style:font-weight-asian="bold" style:font-name-complex="Arial2" style:font-size-complex="10.5pt" style:font-weight-complex="bold"/>
    </style:style>
    <style:style style:name="T50" style:family="text">
      <style:text-properties fo:color="#595959" loext:opacity="100%" style:font-name="Arial1" fo:font-size="10.5pt" fo:font-weight="bold" fo:background-color="#18ffff" loext:char-shading-value="0" style:font-size-asian="10.5pt" style:font-weight-asian="bold" style:font-name-complex="Arial2" style:font-size-complex="10.5pt" style:font-weight-complex="bold"/>
    </style:style>
    <style:style style:name="T51" style:family="text">
      <style:text-properties fo:color="#595959" loext:opacity="100%" fo:font-size="10.5pt" fo:font-weight="bold" fo:background-color="#ffd740" loext:char-shading-value="0" style:font-name-asian="Arial2" style:font-size-asian="10.5pt" style:font-weight-asian="bold" style:font-name-complex="Arial2" style:font-size-complex="10.5pt" style:font-weight-complex="bold"/>
    </style:style>
    <style:style style:name="T52" style:family="text">
      <style:text-properties fo:color="#18ffff" loext:opacity="100%" style:font-name="Arial1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53" style:family="text">
      <style:text-properties fo:color="#ff3d00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54" style:family="text">
      <style:text-properties fo:color="#ffd740" loext:opacity="100%" style:font-name="Arial1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55" style:family="text">
      <style:text-properties fo:color="#ff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56" style:family="text">
      <style:text-properties fo:color="#1f4e79" loext:opacity="100%" fo:font-size="16pt" fo:font-weight="bold" style:font-size-asian="16pt" style:font-weight-asian="bold" style:font-name-complex="Arial2" style:font-size-complex="16pt" style:font-weight-complex="bold"/>
    </style:style>
    <style:style style:name="T57" style:family="text">
      <style:text-properties fo:color="#2e75b6" loext:opacity="100%" fo:font-size="13pt" fo:font-weight="bold" style:font-size-asian="13pt" style:font-weight-asian="bold" style:font-name-complex="Arial2" style:font-size-complex="13pt" style:font-weight-complex="bold"/>
    </style:style>
    <style:style style:name="T58" style:family="text">
      <style:text-properties fo:color="#595959" loext:opacity="100%" style:font-name="Arial1" fo:font-size="11pt" style:font-name-asian="Arial2" style:font-size-asian="11pt" style:font-name-complex="Arial2" style:font-size-complex="11pt"/>
    </style:style>
    <style:style style:name="T59" style:family="text">
      <style:text-properties fo:color="#595959" loext:opacity="100%" style:font-name="Arial1" fo:font-size="11pt" style:font-size-asian="11pt" style:font-name-complex="Arial2" style:font-size-complex="11pt"/>
    </style:style>
    <style:style style:name="T60" style:family="text">
      <style:text-properties fo:color="#18ffff" loext:opacity="100%" style:font-name="Arial1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61" style:family="text">
      <style:text-properties fo:color="#595959" loext:opacity="100%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62" style:family="text">
      <style:text-properties fo:color="#595959" loext:opacity="100%" fo:font-size="11pt" style:font-size-asian="11pt" style:font-name-complex="Arial2" style:font-size-complex="11pt"/>
    </style:style>
    <style:style style:name="T63" style:family="text">
      <style:text-properties fo:color="#76ff03" loext:opacity="100%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64" style:family="text">
      <style:text-properties fo:color="#76ff03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65" style:family="text">
      <style:text-properties fo:color="#ff3d00" loext:opacity="100%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66" style:family="text">
      <style:text-properties fo:color="#595959" loext:opacity="100%" fo:font-size="10.5pt" style:font-size-asian="10.5pt" style:font-name-complex="Arial2" style:font-size-complex="10.5pt"/>
    </style:style>
    <style:style style:name="T67" style:family="text">
      <style:text-properties fo:color="#c6ff00" loext:opacity="100%" fo:font-size="10.5pt" fo:font-weight="bold" fo:background-color="#f50057" loext:char-shading-value="0" style:font-name-asian="Arial2" style:font-size-asian="10.5pt" style:font-weight-asian="bold" style:font-name-complex="Arial2" style:font-size-complex="10.5pt" style:font-weight-complex="bold"/>
    </style:style>
    <style:style style:name="T68" style:family="text">
      <style:text-properties fo:color="#ffff00" loext:opacity="100%" style:font-name="Arial1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69" style:family="text">
      <style:text-properties fo:color="#ffff00" loext:opacity="100%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70" style:family="text">
      <style:text-properties fo:color="#18ffff" loext:opacity="100%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71" style:family="text">
      <style:text-properties fo:color="#c6ff00" loext:opacity="100%" style:font-name="Arial1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72" style:family="text">
      <style:text-properties fo:color="#ffff00" loext:opacity="100%" fo:font-size="10.5pt" fo:font-weight="bold" fo:background-color="#ff9100" loext:char-shading-value="0" style:font-name-asian="Arial2" style:font-size-asian="10.5pt" style:font-weight-asian="bold" style:font-name-complex="Arial2" style:font-size-complex="10.5pt" style:font-weight-complex="bold"/>
    </style:style>
    <style:style style:name="T73" style:family="text">
      <style:text-properties fo:color="#ffff00" loext:opacity="100%" fo:font-size="10.5pt" fo:font-weight="bold" fo:background-color="#ff9100" loext:char-shading-value="0" style:font-size-asian="10.5pt" style:font-weight-asian="bold" style:font-name-complex="Arial2" style:font-size-complex="10.5pt" style:font-weight-complex="bold"/>
    </style:style>
    <style:style style:name="T74" style:family="text">
      <style:text-properties fo:color="#18ffff" loext:opacity="100%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75" style:family="text">
      <style:text-properties fo:color="#00e676" loext:opacity="100%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76" style:family="text">
      <style:text-properties fo:color="#c6ff00" loext:opacity="100%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77" style:family="text">
      <style:text-properties fo:color="#ff3d00" loext:opacity="100%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78" style:family="text">
      <style:text-properties fo:color="#ffd740" loext:opacity="100%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79" style:family="text">
      <style:text-properties fo:color="#59595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80" style:family="text">
      <style:text-properties fo:color="#595959" loext:opacity="100%" fo:font-size="11pt" fo:font-weight="bold" style:font-size-asian="11pt" style:font-weight-asian="bold" style:font-name-complex="Arial2" style:font-size-complex="11pt" style:font-weight-complex="bold"/>
    </style:style>
    <style:style style:name="T81" style:family="text">
      <style:text-properties fo:color="#00e676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82" style:family="text">
      <style:text-properties fo:color="#00e676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83" style:family="text">
      <style:text-properties fo:color="#18ffff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84" style:family="text">
      <style:text-properties fo:color="#18ffff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85" style:family="text">
      <style:text-properties fo:color="#595959" loext:opacity="100%" fo:font-size="10.5pt" fo:font-weight="bold" fo:background-color="#ffd740" loext:char-shading-value="0" style:font-size-asian="10.5pt" style:font-weight-asian="bold" style:font-name-complex="Arial2" style:font-size-complex="10.5pt" style:font-weight-complex="bold"/>
    </style:style>
    <style:style style:name="T86" style:family="text">
      <style:text-properties fo:color="#595959" loext:opacity="100%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87" style:family="text">
      <style:text-properties fo:color="#18ffff" loext:opacity="100%" fo:font-size="13pt" fo:font-weight="bold" fo:background-color="#d500f9" loext:char-shading-value="0" style:font-name-asian="Arial2" style:font-size-asian="13pt" style:font-weight-asian="bold" style:font-name-complex="Arial2" style:font-size-complex="13pt" style:font-weight-complex="bold"/>
    </style:style>
    <style:style style:name="T88" style:family="text">
      <style:text-properties fo:color="#18ffff" loext:opacity="100%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89" style:family="text">
      <style:text-properties fo:color="#ffff00" loext:opacity="100%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90" style:family="text">
      <style:text-properties fo:color="#c6ff00" loext:opacity="100%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91" style:family="text">
      <style:text-properties fo:color="#ffd740" loext:opacity="100%" style:font-name="Arial1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92" style:family="text">
      <style:text-properties fo:color="#00e676" loext:opacity="100%" fo:font-size="28pt" fo:font-weight="bold" fo:background-color="#d500f9" loext:char-shading-value="0" style:font-name-asian="Arial2" style:font-size-asian="28pt" style:font-weight-asian="bold" style:font-name-complex="Arial2" style:font-size-complex="28pt" style:font-weight-complex="bold"/>
    </style:style>
    <style:style style:name="T93" style:family="text">
      <style:text-properties fo:color="#00e676" loext:opacity="100%" style:font-name="Arial1" fo:font-size="28pt" fo:font-weight="bold" fo:background-color="#d500f9" loext:char-shading-value="0" style:font-size-asian="28pt" style:font-weight-asian="bold" style:font-name-complex="Arial2" style:font-size-complex="28pt" style:font-weight-complex="bold"/>
    </style:style>
    <style:style style:name="T94" style:family="text">
      <style:text-properties fo:color="#ffd740" loext:opacity="100%" fo:font-size="10.5pt" fo:font-weight="bold" fo:background-color="#651fff" loext:char-shading-value="0" style:font-name-asian="Arial2" style:font-size-asian="10.5pt" style:font-weight-asian="bold" style:font-name-complex="Arial2" style:font-size-complex="10.5pt" style:font-weight-complex="bold"/>
    </style:style>
    <style:style style:name="T95" style:family="text">
      <style:text-properties fo:color="#ffd740" loext:opacity="100%" fo:font-size="10.5pt" fo:font-weight="bold" fo:background-color="#651fff" loext:char-shading-value="0" style:font-size-asian="10.5pt" style:font-weight-asian="bold" style:font-name-complex="Arial2" style:font-size-complex="10.5pt" style:font-weight-complex="bold"/>
    </style:style>
    <style:style style:name="T96" style:family="text">
      <style:text-properties fo:color="#ffff00" loext:opacity="100%" fo:font-size="10.5pt" fo:font-weight="bold" fo:background-color="#1de9b6" loext:char-shading-value="0" style:font-size-asian="10.5pt" style:font-weight-asian="bold" style:font-name-complex="Arial2" style:font-size-complex="10.5pt" style:font-weight-complex="bold"/>
    </style:style>
    <style:style style:name="T97" style:family="text">
      <style:text-properties fo:color="#ffd74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98" style:family="text">
      <style:text-properties fo:color="#ffd740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99" style:family="text">
      <style:text-properties fo:color="#ffd740" loext:opacity="100%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00" style:family="text">
      <style:text-properties fo:color="#3d5afe" loext:opacity="100%" style:font-name="Arial1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101" style:family="text">
      <style:text-properties fo:color="#3d5afe" loext:opacity="100%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102" style:family="text">
      <style:text-properties fo:color="#00e676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103" style:family="text">
      <style:text-properties fo:color="#00e676" loext:opacity="100%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104" style:family="text">
      <style:text-properties fo:color="#595959" loext:opacity="100%" style:font-name="Arial1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05" style:family="text">
      <style:text-properties fo:color="#595959" loext:opacity="100%" fo:font-size="11pt" fo:font-weight="bold" fo:background-color="#76ff03" loext:char-shading-value="0" style:font-size-asian="11pt" style:font-weight-asian="bold" style:font-name-complex="Arial2" style:font-size-complex="11pt" style:font-weight-complex="bold"/>
    </style:style>
    <style:style style:name="T106" style:family="text">
      <style:text-properties fo:color="#76ff03" loext:opacity="100%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107" style:family="text">
      <style:text-properties fo:color="#ff3d00" loext:opacity="100%" fo:font-size="10.5pt" fo:font-weight="bold" fo:background-color="#00e676" loext:char-shading-value="0" style:font-size-asian="10.5pt" style:font-weight-asian="bold" style:font-name-complex="Arial2" style:font-size-complex="10.5pt" style:font-weight-complex="bold"/>
    </style:style>
    <style:style style:name="T108" style:family="text">
      <style:text-properties fo:color="#1f4e79" loext:opacity="100%" fo:font-size="10.5pt" fo:font-weight="bold" style:font-size-asian="10.5pt" style:font-weight-asian="bold" style:font-name-complex="Arial2" style:font-size-complex="10.5pt" style:font-weight-complex="bold"/>
    </style:style>
    <style:style style:name="T109" style:family="text">
      <style:text-properties fo:color="#00e676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110" style:family="text">
      <style:text-properties fo:color="#1f3864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11" style:family="text">
      <style:text-properties fo:color="#1f3864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112" style:family="text">
      <style:text-properties fo:color="#2e75b6" loext:opacity="100%" style:font-name="Arial1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T113" style:family="text">
      <style:text-properties fo:color="#2e75b6" loext:opacity="100%" style:font-name="Arial1" fo:font-size="15pt" fo:font-weight="bold" style:font-size-asian="15pt" style:font-weight-asian="bold" style:font-name-complex="Arial2" style:font-size-complex="15pt" style:font-weight-complex="bold"/>
    </style:style>
    <style:style style:name="T114" style:family="text">
      <style:text-properties fo:color="#2e75b6" loext:opacity="100%" style:font-name="Arial1" fo:font-size="15pt" fo:font-weight="bold" fo:background-color="#ffd740" loext:char-shading-value="0" style:font-size-asian="15pt" style:font-weight-asian="bold" style:font-name-complex="Arial2" style:font-size-complex="15pt" style:font-weight-complex="bold"/>
    </style:style>
    <style:style style:name="T115" style:family="text">
      <style:text-properties fo:color="#2e75b6" loext:opacity="100%" style:font-name="Arial1" fo:font-size="15pt" fo:font-weight="bold" fo:background-color="#ffd740" loext:char-shading-value="0" style:font-name-asian="Arial2" style:font-size-asian="15pt" style:font-weight-asian="bold" style:font-name-complex="Arial2" style:font-size-complex="15pt" style:font-weight-complex="bold"/>
    </style:style>
    <style:style style:name="T116" style:family="text">
      <style:text-properties fo:color="#ff3d00" loext:opacity="100%" style:font-name="Arial1" fo:font-size="15pt" fo:font-weight="bold" fo:background-color="#64ffda" loext:char-shading-value="0" style:font-size-asian="15pt" style:font-weight-asian="bold" style:font-name-complex="Arial2" style:font-size-complex="15pt" style:font-weight-complex="bold"/>
    </style:style>
    <style:style style:name="T117" style:family="text">
      <style:text-properties fo:color="#1a1a1a" loext:opacity="100%" style:font-name="Arial1" fo:font-size="12pt" style:font-name-asian="Arial2" style:font-size-asian="12pt" style:font-name-complex="Arial2" style:font-size-complex="12pt"/>
    </style:style>
    <style:style style:name="T118" style:family="text">
      <style:text-properties fo:color="#1a1a1a" loext:opacity="100%" style:font-name="Arial1" fo:font-size="12pt" style:font-size-asian="12pt" style:font-name-complex="Arial2" style:font-size-complex="12pt"/>
    </style:style>
    <style:style style:name="T119" style:family="text"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T120" style:family="text">
      <style:text-properties fo:color="#2b2b2b" loext:opacity="100%" style:font-name="Courier New" fo:font-size="9.5pt" fo:font-weight="bold" fo:background-color="#ffff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21" style:family="text">
      <style:text-properties fo:color="#00e676" loext:opacity="100%" style:font-name="Courier New" fo:font-size="9.5pt" fo:font-weight="bold" fo:background-color="#5d403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22" style:family="text">
      <style:text-properties fo:color="#d500f9" loext:opacity="100%" style:font-name="Courier New" fo:font-size="9.5pt" fo:font-weight="bold" fo:background-color="#18ffff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23" style:family="text">
      <style:text-properties fo:color="#ffff00" loext:opacity="100%" style:font-name="Courier New" fo:font-size="9.5pt" fo:font-weight="bold" fo:background-color="#ff91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24" style:family="text">
      <style:text-properties fo:color="#00e676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125" style:family="text">
      <style:text-properties fo:color="#00e676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126" style:family="text">
      <style:text-properties fo:color="#18ffff" loext:opacity="100%" style:font-name="Arial1" fo:font-size="12pt" fo:font-weight="bold" fo:background-color="#d500f9" loext:char-shading-value="0" style:font-size-asian="12pt" style:font-weight-asian="bold" style:font-name-complex="Arial2" style:font-size-complex="12pt" style:font-weight-complex="bold"/>
    </style:style>
    <style:style style:name="T127" style:family="text">
      <style:text-properties fo:color="#1a1a1a" loext:opacity="100%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28" style:family="text">
      <style:text-properties fo:color="#1a1a1a" loext:opacity="100%" style:font-name="Arial1" fo:font-size="12pt" fo:font-weight="bold" style:font-size-asian="12pt" style:font-weight-asian="bold" style:font-name-complex="Arial2" style:font-size-complex="12pt" style:font-weight-complex="bold"/>
    </style:style>
    <style:style style:name="T129" style:family="text">
      <style:text-properties fo:color="#1a1a1a" loext:opacity="100%" style:font-name="Arial1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130" style:family="text">
      <style:text-properties fo:color="#1a1a1a" loext:opacity="100%" style:font-name="Arial1" fo:font-size="12pt" fo:font-weight="normal" style:font-size-asian="12pt" style:font-weight-asian="normal" style:font-name-complex="Arial2" style:font-size-complex="12pt" style:font-weight-complex="normal"/>
    </style:style>
    <style:style style:name="T131" style:family="text">
      <style:text-properties fo:color="#1a1a1a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32" style:family="text">
      <style:text-properties fo:color="#ffd740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133" style:family="text">
      <style:text-properties fo:color="#c6ff00" loext:opacity="100%" style:font-name="Courier New" fo:font-size="9.5pt" fo:font-weight="bold" fo:background-color="#f5005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34" style:family="text">
      <style:text-properties fo:color="#76ff03" loext:opacity="100%" style:font-name="Arial1" fo:font-size="12pt" fo:font-weight="bold" fo:background-color="#6d4c41" loext:char-shading-value="0" style:font-size-asian="12pt" style:font-weight-asian="bold" style:font-name-complex="Arial2" style:font-size-complex="12pt" style:font-weight-complex="bold"/>
    </style:style>
    <style:style style:name="T135" style:family="text">
      <style:text-properties fo:color="#ff3d00" loext:opacity="100%" style:font-name="Arial1" fo:font-size="12pt" fo:font-weight="bold" fo:background-color="#64ffda" loext:char-shading-value="0" style:font-size-asian="12pt" style:font-weight-asian="bold" style:font-name-complex="Arial2" style:font-size-complex="12pt" style:font-weight-complex="bold"/>
    </style:style>
    <style:style style:name="T136" style:family="text">
      <style:text-properties fo:color="#ff3d00" loext:opacity="100%" style:font-name="Arial1" fo:font-size="12pt" fo:font-weight="bold" fo:background-color="#64ffda" loext:char-shading-value="0" style:font-name-asian="Arial2" style:font-size-asian="12pt" style:font-weight-asian="bold" style:font-name-complex="Arial2" style:font-size-complex="12pt" style:font-weight-complex="bold"/>
    </style:style>
    <style:style style:name="T137" style:family="text">
      <style:text-properties fo:color="#1a1a1a" loext:opacity="100%" style:font-name="Arial1" fo:font-size="12pt" fo:font-weight="bold" fo:background-color="#ffd740" loext:char-shading-value="0" style:font-name-asian="Arial2" style:font-size-asian="12pt" style:font-weight-asian="bold" style:font-name-complex="Arial2" style:font-size-complex="12pt" style:font-weight-complex="bold"/>
    </style:style>
    <style:style style:name="T138" style:family="text">
      <style:text-properties fo:color="#1a1a1a" loext:opacity="100%" style:font-name="Arial1" fo:font-size="12pt" fo:font-weight="bold" fo:background-color="#ffd740" loext:char-shading-value="0" style:font-size-asian="12pt" style:font-weight-asian="bold" style:font-name-complex="Arial2" style:font-size-complex="12pt" style:font-weight-complex="bold"/>
    </style:style>
    <style:style style:name="T139" style:family="text">
      <style:text-properties fo:color="#18ffff" loext:opacity="100%" style:font-name="Arial1" fo:font-size="12pt" fo:font-weight="bold" fo:background-color="#d500f9" loext:char-shading-value="0" style:font-name-asian="Arial2" style:font-size-asian="12pt" style:font-weight-asian="bold" style:font-name-complex="Arial2" style:font-size-complex="12pt" style:font-weight-complex="bold"/>
    </style:style>
    <style:style style:name="T140" style:family="text">
      <style:text-properties fo:color="#ffff00" loext:opacity="100%" style:font-name="Arial1" fo:font-size="12pt" fo:font-weight="bold" fo:background-color="#ff9100" loext:char-shading-value="0" style:font-size-asian="12pt" style:font-weight-asian="bold" style:font-name-complex="Arial2" style:font-size-complex="12pt" style:font-weight-complex="bold"/>
    </style:style>
    <style:style style:name="T141" style:family="text">
      <style:text-properties fo:color="#1a1a1a" loext:opacity="100%" style:font-name="Arial1" fo:font-size="12pt" fo:background-color="#ffff00" loext:char-shading-value="0" style:font-size-asian="12pt" style:font-name-complex="Arial2" style:font-size-complex="12pt"/>
    </style:style>
    <style:style style:name="T142" style:family="text">
      <style:text-properties fo:color="#c6ff00" loext:opacity="100%" style:font-name="Arial1" fo:font-size="12pt" fo:font-weight="bold" fo:background-color="#f50057" loext:char-shading-value="0" style:font-size-asian="12pt" style:font-weight-asian="bold" style:font-name-complex="Arial2" style:font-size-complex="12pt" style:font-weight-complex="bold"/>
    </style:style>
    <style:style style:name="T143" style:family="text">
      <style:text-properties fo:color="#ffd740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144" style:family="text">
      <style:text-properties fo:color="#2b2b2b" loext:opacity="100%" style:font-name="Courier New" fo:font-size="9.5pt" fo:font-weight="bold" fo:background-color="#18ffff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45" style:family="text">
      <style:text-properties fo:color="#1de9b6" loext:opacity="100%" style:font-name="Courier New" fo:font-size="9.5pt" fo:font-weight="bold" fo:background-color="#6d4c41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46" style:family="text">
      <style:text-properties fo:color="#1de9b6" loext:opacity="100%" style:font-name="Courier New" fo:font-size="9.5pt" style:font-name-asian="Courier New1" style:font-size-asian="9.5pt" style:font-name-complex="Courier New1" style:font-size-complex="9.5pt"/>
    </style:style>
    <style:style style:name="T147" style:family="text">
      <style:text-properties fo:color="#1a1a1a" loext:opacity="100%" style:font-name="Arial1" fo:font-size="12pt" fo:font-weight="bold" fo:background-color="#ffab40" loext:char-shading-value="0" style:font-size-asian="12pt" style:font-weight-asian="bold" style:font-name-complex="Arial2" style:font-size-complex="12pt" style:font-weight-complex="bold"/>
    </style:style>
    <style:style style:name="T148" style:family="text">
      <style:text-properties fo:color="#1a1a1a" loext:opacity="100%" style:font-name="Arial1" fo:font-size="12pt" fo:font-weight="bold" fo:background-color="#ffab40" loext:char-shading-value="0" style:font-name-asian="Arial2" style:font-size-asian="12pt" style:font-weight-asian="bold" style:font-name-complex="Arial2" style:font-size-complex="12pt" style:font-weight-complex="bold"/>
    </style:style>
    <style:style style:name="T149" style:family="text">
      <style:text-properties fo:color="#ff1744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50" style:family="text">
      <style:text-properties fo:color="#1a1a1a" loext:opacity="100%" style:font-name="Arial1" fo:font-size="12pt" fo:font-weight="bold" fo:background-color="#ffff00" loext:char-shading-value="0" style:font-name-asian="Arial2" style:font-size-asian="12pt" style:font-weight-asian="bold" style:font-name-complex="Arial2" style:font-size-complex="12pt" style:font-weight-complex="bold"/>
    </style:style>
    <style:style style:name="T151" style:family="text">
      <style:text-properties fo:color="#ff1744" loext:opacity="100%" style:font-name="Arial1" fo:font-size="12pt" fo:font-weight="bold" fo:background-color="#ffcdd2" loext:char-shading-value="0" style:font-name-asian="Arial2" style:font-size-asian="12pt" style:font-weight-asian="bold" style:font-name-complex="Arial2" style:font-size-complex="12pt" style:font-weight-complex="bold"/>
    </style:style>
    <style:style style:name="T152" style:family="text">
      <style:text-properties fo:color="#ff4081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53" style:family="text">
      <style:text-properties fo:color="#ff4081" loext:opacity="100%" style:font-name="Arial1" fo:font-size="12pt" fo:font-weight="bold" fo:background-color="#fce4ec" loext:char-shading-value="0" style:font-name-asian="Arial2" style:font-size-asian="12pt" style:font-weight-asian="bold" style:font-name-complex="Arial2" style:font-size-complex="12pt" style:font-weight-complex="bold"/>
    </style:style>
    <style:style style:name="T154" style:family="text">
      <style:text-properties fo:color="#ff1744" loext:opacity="100%" style:font-name="Arial1" fo:font-size="12pt" fo:font-weight="bold" fo:background-color="#ffebee" loext:char-shading-value="0" style:font-name-asian="Arial2" style:font-size-asian="12pt" style:font-weight-asian="bold" style:font-name-complex="Arial2" style:font-size-complex="12pt" style:font-weight-complex="bold"/>
    </style:style>
    <style:style style:name="T155" style:family="text">
      <style:text-properties fo:color="#ff1744" loext:opacity="100%" style:font-name="Arial1" fo:font-size="12pt" fo:font-weight="bold" fo:background-color="#ffebee" loext:char-shading-value="0" style:font-size-asian="12pt" style:font-weight-asian="bold" style:font-name-complex="Arial2" style:font-size-complex="12pt" style:font-weight-complex="bold"/>
    </style:style>
    <style:style style:name="T156" style:family="text">
      <style:text-properties fo:color="#ff4081" loext:opacity="100%" style:font-name="Arial1" fo:font-size="12pt" fo:font-weight="bold" fo:background-color="#fce4ec" loext:char-shading-value="0" style:font-size-asian="12pt" style:font-weight-asian="bold" style:font-name-complex="Arial2" style:font-size-complex="12pt" style:font-weight-complex="bold"/>
    </style:style>
    <style:style style:name="T157" style:family="text">
      <style:text-properties fo:color="#8d6e63" loext:opacity="100%" style:font-name="Arial1" fo:font-size="12pt" fo:font-weight="bold" fo:background-color="#76ff03" loext:char-shading-value="0" style:font-size-asian="12pt" style:font-weight-asian="bold" style:font-name-complex="Arial2" style:font-size-complex="12pt" style:font-weight-complex="bold"/>
    </style:style>
    <style:style style:name="T158" style:family="text">
      <style:text-properties fo:color="#ffd740" loext:opacity="100%" style:font-name="Courier New" fo:font-size="9.5pt" fo:font-weight="bold" fo:background-color="#3d5afe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59" style:family="text">
      <style:text-properties fo:color="#d500f9" loext:opacity="100%" style:font-name="Courier New" fo:font-size="9.5pt" fo:font-weight="bold" fo:background-color="#f3e5f5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60" style:family="text">
      <style:text-properties fo:color="#ff3d00" loext:opacity="100%" style:font-name="Courier New" fo:font-size="9.5pt" fo:font-weight="bold" fo:background-color="#fbe9e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61" style:family="text">
      <style:text-properties fo:color="#ff1744" loext:opacity="100%" style:font-name="Arial1" fo:font-size="12pt" fo:font-weight="bold" fo:background-color="#6d4c41" loext:char-shading-value="0" style:font-name-asian="Arial2" style:font-size-asian="12pt" style:font-weight-asian="bold" style:font-name-complex="Arial2" style:font-size-complex="12pt" style:font-weight-complex="bold"/>
    </style:style>
    <style:style style:name="T162" style:family="text">
      <style:text-properties fo:color="#e0e0e0" loext:opacity="100%" style:font-name="Arial1" fo:font-size="12pt" fo:font-weight="bold" fo:background-color="#ff1744" loext:char-shading-value="0" style:font-size-asian="12pt" style:font-weight-asian="bold" style:font-name-complex="Arial2" style:font-size-complex="12pt" style:font-weight-complex="bold"/>
    </style:style>
    <style:style style:name="T163" style:family="text">
      <style:text-properties fo:color="#ff4081" loext:opacity="100%" style:font-name="Arial1" fo:font-size="12pt" fo:font-weight="bold" fo:background-color="#6d4c41" loext:char-shading-value="0" style:font-name-asian="Arial2" style:font-size-asian="12pt" style:font-weight-asian="bold" style:font-name-complex="Arial2" style:font-size-complex="12pt" style:font-weight-complex="bold"/>
    </style:style>
    <style:style style:name="T164" style:family="text">
      <style:text-properties fo:color="#e0e0e0" loext:opacity="100%" style:font-name="Arial1" fo:font-size="12pt" fo:font-weight="bold" fo:background-color="#ff4081" loext:char-shading-value="0" style:font-size-asian="12pt" style:font-weight-asian="bold" style:font-name-complex="Arial2" style:font-size-complex="12pt" style:font-weight-complex="bold"/>
    </style:style>
    <style:style style:name="T165" style:family="text">
      <style:text-properties fo:color="#ffd740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166" style:family="text">
      <style:text-properties fo:color="#ffd740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167" style:family="text">
      <style:text-properties fo:color="#1a1a1a" loext:opacity="100%" style:font-name="Arial1" fo:font-size="12pt" fo:font-weight="bold" fo:background-color="#76ff03" loext:char-shading-value="0" style:font-size-asian="12pt" style:font-weight-asian="bold" style:font-name-complex="Arial2" style:font-size-complex="12pt" style:font-weight-complex="bold"/>
    </style:style>
    <style:style style:name="T168" style:family="text">
      <style:text-properties fo:color="#c6ff00" loext:opacity="100%" style:font-name="Arial1" fo:font-size="13pt" fo:font-weight="bold" fo:background-color="#f50057" loext:char-shading-value="0" style:font-size-asian="13pt" style:font-weight-asian="bold" style:font-name-complex="Arial2" style:font-size-complex="13pt" style:font-weight-complex="bold"/>
    </style:style>
    <style:style style:name="T169" style:family="text">
      <style:text-properties fo:color="#ffff00" loext:opacity="100%" style:font-name="Arial1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170" style:family="text">
      <style:text-properties fo:color="#404040" loext:opacity="100%" style:font-name="Arial1" fo:font-size="11pt" style:font-name-asian="Arial2" style:font-size-asian="11pt" style:font-name-complex="Arial2" style:font-size-complex="11pt"/>
    </style:style>
    <style:style style:name="T171" style:family="text">
      <style:text-properties fo:color="#404040" loext:opacity="100%" fo:font-size="11pt" style:font-name-asian="Arial2" style:font-size-asian="11pt" style:font-name-complex="Arial2" style:font-size-complex="11pt"/>
    </style:style>
    <style:style style:name="T172" style:family="text">
      <style:text-properties fo:color="#76ff03" loext:opacity="100%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173" style:family="text">
      <style:text-properties fo:color="#1f4e79" loext:opacity="100%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74" style:family="text">
      <style:text-properties fo:color="#ff3d00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175" style:family="text">
      <style:text-properties fo:color="#eeff41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76" style:family="text">
      <style:text-properties fo:color="#ff4081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77" style:family="text">
      <style:text-properties fo:color="#18ffff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178" style:family="text">
      <style:text-properties fo:color="#ffff00" loext:opacity="100%" fo:font-size="11pt" fo:font-weight="bold" fo:background-color="#ff9100" loext:char-shading-value="0" style:font-name-asian="Arial2" style:font-size-asian="11pt" style:font-weight-asian="bold" style:font-name-complex="Arial2" style:font-size-complex="11pt" style:font-weight-complex="bold"/>
    </style:style>
    <style:style style:name="T179" style:family="text">
      <style:text-properties fo:color="#c6ff00" loext:opacity="100%" fo:font-size="10.5pt" fo:font-weight="bold" fo:background-color="#ff4081" loext:char-shading-value="0" style:font-name-asian="Arial2" style:font-size-asian="10.5pt" style:font-weight-asian="bold" style:font-name-complex="Arial2" style:font-size-complex="10.5pt" style:font-weight-complex="bold"/>
    </style:style>
    <style:style style:name="T180" style:family="text">
      <style:text-properties fo:color="#ffff00" loext:opacity="100%" fo:font-size="10.5pt" fo:font-weight="bold" fo:background-color="#ff9100" loext:char-shading-value="0" style:font-name-asian="Arial2" style:font-size-asian="10.5pt" style:font-weight-asian="bold" style:font-name-complex="Arial2" style:font-size-complex="10.5pt" style:font-weight-complex="bold"/>
    </style:style>
    <style:style style:name="T181" style:family="text">
      <style:text-properties fo:color="#595959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182" style:family="text">
      <style:text-properties fo:color="#ff910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83" style:family="text">
      <style:text-properties fo:color="#18ffff" loext:opacity="100%" fo:font-size="10.5pt" fo:font-weight="bold" fo:background-color="#d500f9" loext:char-shading-value="0" style:font-name-asian="Arial2" style:font-size-asian="10.5pt" style:font-weight-asian="bold" style:font-name-complex="Arial2" style:font-size-complex="10.5pt" style:font-weight-complex="bold"/>
    </style:style>
    <style:style style:name="T184" style:family="text">
      <style:text-properties fo:color="#2e75b6" loext:opacity="100%" style:font-name="Arial1" fo:font-size="13pt" fo:font-weight="bold" fo:background-color="#ffd740" loext:char-shading-value="0" style:font-size-asian="13pt" style:font-weight-asian="bold" style:font-name-complex="Arial2" style:font-size-complex="13pt" style:font-weight-complex="bold"/>
    </style:style>
    <style:style style:name="T185" style:family="text">
      <style:text-properties fo:color="#ffc40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186" style:family="text">
      <style:text-properties fo:color="#ff1744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187" style:family="text">
      <style:text-properties fo:color="#18ffff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88" style:family="text">
      <style:text-properties fo:font-size="10.5pt" style:font-name-asian="Arial2" style:font-size-asian="10.5pt" style:font-name-complex="Arial2" style:font-size-complex="10.5pt"/>
    </style:style>
    <style:style style:name="T189" style:family="text">
      <style:text-properties fo:color="#eeff41" loext:opacity="100%" fo:font-size="10.5pt" fo:background-color="#d500f9" loext:char-shading-value="0" style:font-name-asian="Arial2" style:font-size-asian="10.5pt" style:font-name-complex="Arial2" style:font-size-complex="10.5pt"/>
    </style:style>
    <style:style style:name="T190" style:family="text">
      <style:text-properties fo:color="#eeff41" loext:opacity="100%" fo:font-size="10.5pt" fo:background-color="#ff1744" loext:char-shading-value="0" style:font-name-asian="Arial2" style:font-size-asian="10.5pt" style:font-name-complex="Arial2" style:font-size-complex="10.5pt"/>
    </style:style>
    <style:style style:name="T191" style:family="text">
      <style:text-properties fo:color="#ffff0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192" style:family="text">
      <style:text-properties fo:color="#ffffff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93" style:family="text">
      <style:text-properties fo:color="#ffffff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194" style:family="text">
      <style:text-properties fo:color="#1a1a1a" loext:opacity="100%" style:font-name="Arial1" fo:font-size="11pt" style:font-name-asian="Arial2" style:font-size-asian="11pt" style:font-name-complex="Arial2" style:font-size-complex="11pt"/>
    </style:style>
    <style:style style:name="T195" style:family="text">
      <style:text-properties fo:color="#1a1a1a" loext:opacity="100%" style:font-name="Arial1" fo:font-size="11pt" style:font-size-asian="11pt" style:font-name-complex="Arial2" style:font-size-complex="11pt"/>
    </style:style>
    <style:style style:name="T196" style:family="text">
      <style:text-properties fo:color="#ff5252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197" style:family="text">
      <style:text-properties fo:color="#ff5252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198" style:family="text">
      <style:text-properties fo:color="#1f3864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99" style:family="text">
      <style:text-properties fo:color="#1f3864" loext:opacity="100%" style:font-name="Arial1" fo:font-size="13pt" fo:font-weight="bold" style:font-size-asian="13pt" style:font-weight-asian="bold" style:font-name-complex="Arial2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【</text:span><text:span text:style-name="T3">11</text:span><text:span text:style-name="T2">】堆積（</text:span><text:span text:style-name="T3">Heap</text:span><text:span text:style-name="T2">）＋優先佇列（</text:span><text:span text:style-name="T3">Priority Queue</text:span><text:span text:style-name="T2">）</text:span></text:p>
      <text:p text:style-name="P2" loext:marker-style-name="T4"><text:span text:style-name="T5">資訊類公職考試完整筆記 ● 考點：</text:span><text:span text:style-name="T6">110</text:span><text:span text:style-name="T5">地</text:span><text:span text:style-name="T6">Q4</text:span><text:span text:style-name="T5">、</text:span><text:span text:style-name="T6">111</text:span><text:span text:style-name="T5">地</text:span><text:span text:style-name="T6">Q4</text:span><text:span text:style-name="T5">、</text:span><text:span text:style-name="T6">113</text:span><text:span text:style-name="T5">地</text:span><text:span text:style-name="T6">Q3</text:span><text:span text:style-name="T5">、</text:span><text:span text:style-name="T6">114</text:span><text:span text:style-name="T5">地</text:span><text:span text:style-name="T6">Q2</text:span></text:p>
      <text:p text:style-name="P3"/>
      <text:h text:style-name="P4" text:outline-level="1" loext:marker-style-name="T7"><text:span text:style-name="T8">一、</text:span><text:span text:style-name="T9">Heap </text:span><text:span text:style-name="T8">的定義與兩大條件</text:span></text:h>
      <text:p text:style-name="P5" loext:marker-style-name="T10"><text:span text:style-name="T11">Heap</text:span><text:span text:style-name="T12">（堆積）是一種特殊的二元樹，必須同時滿足以下兩個條件，缺一不可：</text:span></text:p>
      <text:p text:style-name="P3"/>
      <text:h text:style-name="P6" text:outline-level="2" loext:marker-style-name="T13"><text:span text:style-name="T14">條件</text:span><text:span text:style-name="T15">1</text:span><text:span text:style-name="T14">：</text:span><text:span text:style-name="T15">Complete Binary Tree</text:span><text:span text:style-name="T14">（完全二元樹）</text:span></text:h>
      <text:list xml:id="list2974631855" text:style-name="WWNum5">
        <text:list-item text:start-value="1">
          <text:p text:style-name="P7" loext:marker-style-name="T16"><text:span text:style-name="T17">每一層節點都必須盡量填滿</text:span><text:span text:style-name="T18">。</text:span></text:p>
        </text:list-item>
        <text:list-item text:style-override="WWNum6">
          <text:p text:style-name="P8" loext:marker-style-name="T16"><text:span text:style-name="T19">最後一層</text:span><text:span text:style-name="T18">的節點必須</text:span><text:span text:style-name="T20">從左往右依序填入</text:span><text:span text:style-name="T18">，</text:span><text:span text:style-name="T21">不可跳過</text:span><text:span text:style-name="T18">。</text:span></text:p>
        </text:list-item>
      </text:list>
      <text:p text:style-name="P3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9" loext:marker-style-name="T22"><text:span text:style-name="T23">✅ </text:span><text:span text:style-name="T24">合法 </text:span><text:span text:style-name="T23">Complete Binary Tree</text:span><text:span text:style-name="T24">：</text:span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7"/>100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8"/>/ <text:s text:c="2"/>\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4"/>90 <text:s text:c="4"/>80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4"/>/ \ <text:s text:c="5"/>/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5"><text:span text:style-name="T26">70 <text:s/>60 50</text:span><text:span text:style-name="T25"/></text:p>
          </table:table-cell>
        </table:table-row>
        <table:table-row table:style-name="表格1.1">
          <table:table-cell table:style-name="表格1.A1" office:value-type="string">
            <text:p text:style-name="P9"/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❌ </text:span><text:span text:style-name="T24">不合法（左邊空著）：</text:span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7"/>100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8"/>/ <text:s text:c="2"/>\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4"/>90 <text:s text:c="4"/>80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8"/>\ <text:s text:c="2"/>/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6"/></text:span><text:span text:style-name="T26">60 50</text:span></text:p>
          </table:table-cell>
        </table:table-row>
      </table:table>
      <text:p text:style-name="P3"/>
      <text:h text:style-name="P6" text:outline-level="2" loext:marker-style-name="T13"><text:span text:style-name="T14">條件</text:span><text:span text:style-name="T15">2</text:span><text:span text:style-name="T14">：</text:span><text:span text:style-name="T15">Heap Property</text:span><text:span text:style-name="T14">（堆積性質）</text:span></text:h>
      <text:p text:style-name="P5" loext:marker-style-name="T10"><text:span text:style-name="T12">父節點與子節點之間必須滿足固定的大小關係，分為兩種：</text:span><text:span text:style-name="T10"/></text:p>
      <text:p text:style-name="P3"/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 table:style-name="表格2.1">
            <table:table-cell table:style-name="表格2.A1" office:value-type="string">
              <text:p text:style-name="P10" loext:marker-style-name="T27"><text:span text:style-name="T28">類型</text:span><text:span text:style-name="T27"/></text:p>
            </table:table-cell>
            <table:table-cell table:style-name="表格2.A1" office:value-type="string">
              <text:p text:style-name="P10" loext:marker-style-name="T27"><text:span text:style-name="T28">規則</text:span><text:span text:style-name="T27"/></text:p>
            </table:table-cell>
            <table:table-cell table:style-name="表格2.A1" office:value-type="string">
              <text:p text:style-name="P10" loext:marker-style-name="T27"><text:span text:style-name="T28">範例</text:span><text:span text:style-name="T27"/>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10" loext:marker-style-name="T22"><text:span text:style-name="T29">Min</text:span><text:span text:style-name="T23"> Heap</text:span></text:p>
          </table:table-cell>
          <table:table-cell table:style-name="表格2.A2" office:value-type="string">
            <text:p text:style-name="P10" loext:marker-style-name="T22"><text:span text:style-name="T23">parent ≤ child</text:span><text:span text:style-name="T24">（</text:span><text:span text:style-name="T30">父小子大</text:span><text:span text:style-name="T24">）</text:span></text:p>
          </table:table-cell>
          <table:table-cell table:style-name="表格2.A2" office:value-type="string">
            <text:p text:style-name="P10" loext:marker-style-name="T22"><text:span text:style-name="T23">Root </text:span><text:span text:style-name="T24">必為最小值</text:span></text:p>
          </table:table-cell>
        </table:table-row>
        <table:table-row table:style-name="表格2.1">
          <table:table-cell table:style-name="表格2.A3" office:value-type="string">
            <text:p text:style-name="P10" loext:marker-style-name="T22"><text:span text:style-name="T31">Max</text:span><text:span text:style-name="T23"> Heap</text:span></text:p>
          </table:table-cell>
          <table:table-cell table:style-name="表格2.A3" office:value-type="string">
            <text:p text:style-name="P10" loext:marker-style-name="T22"><text:span text:style-name="T23">parent ≥ child</text:span><text:span text:style-name="T24">（</text:span><text:span text:style-name="T32">父大子小</text:span><text:span text:style-name="T24">）</text:span></text:p>
          </table:table-cell>
          <table:table-cell table:style-name="表格2.A3" office:value-type="string">
            <text:p text:style-name="P10" loext:marker-style-name="T22"><text:span text:style-name="T23">Root </text:span><text:span text:style-name="T24">必為最大值</text:span></text:p>
          </table:table-cell>
        </table:table-row>
      </table:table>
      <text:p text:style-name="P3"><text:soft-page-break/></text:p>
      <text:p text:style-name="P3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9" loext:marker-style-name="T22"><text:span text:style-name="T23">📌 </text:span><text:span text:style-name="T24">核心公式（必背）</text:span></text:p>
          </table:table-cell>
        </table:table-row>
        <table:table-row table:style-name="表格3.1">
          <table:table-cell table:style-name="表格3.A1" office:value-type="string">
            <text:p text:style-name="P9" loext:marker-style-name="T22"><text:span text:style-name="T26">Heap</text:span><text:span text:style-name="T23"> = </text:span><text:span text:style-name="T33">Complete Binary Tree + Heap Property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二、</text:span><text:span text:style-name="T9">Heap </text:span><text:span text:style-name="T8">的陣列表示法（</text:span><text:span text:style-name="T9">Implicit Array</text:span><text:span text:style-name="T8">）</text:span></text:h>
      <text:p text:style-name="P5" loext:marker-style-name="T10"><text:span text:style-name="T12">由於 </text:span><text:span text:style-name="T34">Heap </text:span><text:span text:style-name="T35">是 </text:span><text:span text:style-name="T34">Complete Binary Tree</text:span><text:span text:style-name="T12">，</text:span><text:span text:style-name="T36">節點位置完全可預測</text:span><text:span text:style-name="T12">，因此不需要指標（</text:span><text:span text:style-name="T11">pointer</text:span><text:span text:style-name="T12">），直接用陣列儲存即可，這稱為 </text:span><text:span text:style-name="T11">Implicit Array</text:span><text:span text:style-name="T12">（隱式陣列）。</text:span></text:p>
      <text:p text:style-name="P3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9" loext:marker-style-name="T22"><text:span text:style-name="T24">【索引公式 — 考試必背】</text:span><text:span text:style-name="T22"/></text:p>
          </table:table-cell>
        </table:table-row>
        <table:table-row table:style-name="表格4.1">
          <table:table-cell table:style-name="表格4.A1" office:value-type="string">
            <text:p text:style-name="P9" loext:marker-style-name="T22"><text:span text:style-name="T23"><text:s text:c="2"/>Root <text:s text:c="5"/>→ A[1]</text:span><text:span text:style-name="T22"/></text:p>
          </table:table-cell>
        </table:table-row>
        <table:table-row table:style-name="表格4.1">
          <table:table-cell table:style-name="表格4.A1" office:value-type="string">
            <text:p text:style-name="P9" loext:marker-style-name="T22"><text:span text:style-name="T23"><text:s text:c="2"/></text:span><text:span text:style-name="T37">Parent</text:span><text:span text:style-name="T23"> <text:s text:c="3"/>→ A[</text:span><text:span text:style-name="T38">i / 2</text:span><text:span text:style-name="T23">] <text:s text:c="5"/></text:span><text:span text:style-name="T24">（整數除法）</text:span></text:p>
          </table:table-cell>
        </table:table-row>
        <table:table-row table:style-name="表格4.1">
          <table:table-cell table:style-name="表格4.A1" office:value-type="string">
            <text:p text:style-name="P9" loext:marker-style-name="T22"><text:span text:style-name="T23"><text:s text:c="2"/></text:span><text:span text:style-name="T39">Left child</text:span><text:span text:style-name="T23"> → A[</text:span><text:span text:style-name="T40">2i</text:span><text:span text:style-name="T23">] <text:s text:c="6"/></text:span><text:span text:style-name="T24">（</text:span><text:span text:style-name="T41">多生貴子</text:span><text:span text:style-name="T24">）</text:span></text:p>
          </table:table-cell>
        </table:table-row>
        <table:table-row table:style-name="表格4.1">
          <table:table-cell table:style-name="表格4.A1" office:value-type="string">
            <text:p text:style-name="P9" loext:marker-style-name="T22"><text:span text:style-name="T23"><text:s text:c="2"/></text:span><text:span text:style-name="T39">Right child</text:span><text:span text:style-name="T23"> → A[</text:span><text:span text:style-name="T40">2i + 1</text:span><text:span text:style-name="T23">]</text:span></text:p>
          </table:table-cell>
        </table:table-row>
      </table:table>
      <text:p text:style-name="P3"/>
      <text:h text:style-name="P6" text:outline-level="2" loext:marker-style-name="T13"><text:span text:style-name="T14">範例</text:span><text:span text:style-name="T13"/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9" loext:marker-style-name="T22"><text:span text:style-name="T24">樹狀結構：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8"/>100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7"/>/ <text:s text:c="2"/>\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5"/>90 <text:s text:c="4"/>80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5"/>/ \ <text:s text:c="4"/>/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/>70 <text:s/>60 50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/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4">陣列儲存：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2"/>Index: <text:s/>1 <text:s text:c="3"/>2 <text:s text:c="3"/>3 <text:s text:c="3"/>4 <text:s text:c="3"/>5 <text:s text:c="3"/>6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2"/>Value: 100 <text:s text:c="2"/>90 <text:s text:c="2"/>80 <text:s text:c="2"/>70 <text:s text:c="2"/>60 <text:s text:c="2"/>50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/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4">驗證：</text:span><text:span text:style-name="T23">A[5] = 60</text:span><text:span text:style-name="T24">，</text:span><text:span text:style-name="T23">Parent = A[5/2] = A[2] = 90 ✅</text:span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6"/>Left child = A[10]</text:span><text:span text:style-name="T24">，</text:span><text:span text:style-name="T23">Right child = A[11]</text:span><text:span text:style-name="T24">（皆為空）</text:span></text:p>
          </table:table-cell>
        </table:table-row>
      </table:table>
      <text:p text:style-name="P3"/>
      <text:p text:style-name="P3"/>
      <table:table table:name="表格6" table:style-name="表格6">
        <table:table-column table:style-name="表格6.A"/>
        <text:soft-page-break/>
        <table:table-row table:style-name="表格6.1">
          <table:table-cell table:style-name="表格6.A1" office:value-type="string">
            <text:p text:style-name="P9" loext:marker-style-name="T22"><text:span text:style-name="T23">⚠️ <text:s/></text:span><text:span text:style-name="T24">考試陷阱：</text:span><text:span text:style-name="T42">陣列索引從 </text:span><text:span text:style-name="T38">1 </text:span><text:span text:style-name="T42">開始</text:span><text:span text:style-name="T24">，</text:span><text:span text:style-name="T19">不是 </text:span><text:span text:style-name="T26">0</text:span><text:span text:style-name="T24">。</text:span></text:p>
          </table:table-cell>
        </table:table-row>
        <table:table-row table:style-name="表格6.1">
          <table:table-cell table:style-name="表格6.A1" office:value-type="string">
            <text:p text:style-name="P9" loext:marker-style-name="T22"><text:span text:style-name="T23"><text:s text:c="5"/></text:span><text:span text:style-name="T24">若從 </text:span><text:span text:style-name="T23">0 </text:span><text:span text:style-name="T24">開始則公式不同：</text:span><text:span text:style-name="T23">parent=(i-1)/2, left=2i+1, right=2i+2</text:span><text:span text:style-name="T24">。</text:span></text:p>
          </table:table-cell>
        </table:table-row>
        <table:table-row table:style-name="表格6.1">
          <table:table-cell table:style-name="表格6.A1" office:value-type="string">
            <text:p text:style-name="P9" loext:marker-style-name="T22"><text:span text:style-name="T23"><text:s text:c="5"/></text:span><text:span text:style-name="T24">考題若未特別說明，預設從 </text:span><text:span text:style-name="T23">1 </text:span><text:span text:style-name="T24">開始。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三、</text:span><text:span text:style-name="T9">Heap </text:span><text:span text:style-name="T8">的核心操作與時間複雜度</text:span></text:h>
      <text:h text:style-name="P6" text:outline-level="2" loext:marker-style-name="T13"><text:span text:style-name="T15">3-1 </text:span><text:span text:style-name="T14">插入（</text:span><text:span text:style-name="T15">Insert</text:span><text:span text:style-name="T14">）— </text:span><text:span text:style-name="T15">Bubble Up</text:span><text:span text:style-name="T14">（向上浮）</text:span></text:h>
      <text:p text:style-name="P5" loext:marker-style-name="T10"><text:span text:style-name="T12">步驟：</text:span><text:span text:style-name="T10"/></text:p>
      <text:list xml:id="list200150688734549" text:continue-list="list2974631855" text:style-name="WWNum7">
        <text:list-item>
          <text:p text:style-name="P11" loext:marker-style-name="T16"><text:span text:style-name="T43">Step 1</text:span><text:span text:style-name="T18">：</text:span><text:span text:style-name="T44">將新元素放到陣列最後一個位置</text:span><text:span text:style-name="T18">（</text:span><text:span text:style-name="T43">Complete Binary Tree </text:span><text:span text:style-name="T18">的下一個</text:span><text:span text:style-name="T19">空位</text:span><text:span text:style-name="T18">）。</text:span></text:p>
        </text:list-item>
        <text:list-item text:style-override="WWNum8">
          <text:p text:style-name="P12" loext:marker-style-name="T16"><text:span text:style-name="T43">Step 2</text:span><text:span text:style-name="T18">：</text:span><text:span text:style-name="T45">與父節點比較</text:span><text:span text:style-name="T18">，若違反 </text:span><text:span text:style-name="T43">Heap Property</text:span><text:span text:style-name="T18">，則交換。</text:span></text:p>
        </text:list-item>
        <text:list-item text:style-override="WWNum9">
          <text:p text:style-name="P13" loext:marker-style-name="T16"><text:span text:style-name="T43">Step 3</text:span><text:span text:style-name="T18">：重複 </text:span><text:span text:style-name="T43">Step 2</text:span><text:span text:style-name="T18">，一路往上，直到滿足 </text:span><text:span text:style-name="T43">Heap Property </text:span><text:span text:style-name="T18">或抵達 </text:span><text:span text:style-name="T43">Root </text:span><text:span text:style-name="T18">為止。</text:span></text:p>
        </text:list-item>
      </text:list>
      <text:p text:style-name="P3"/>
      <text:p text:style-name="P14" loext:marker-style-name="T46"><text:span text:style-name="T47">完整範例：</text:span><text:span text:style-name="T48">Max Heap </text:span><text:span text:style-name="T47">插入 </text:span><text:span text:style-name="T48">95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9" loext:marker-style-name="T22"><text:span text:style-name="T24">原始 </text:span><text:span text:style-name="T23">Max Heap</text:span><text:span text:style-name="T24">：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8"/>100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7"/>/ <text:s text:c="2"/>\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6"/>90 <text:s text:c="3"/>80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5"/>/ <text:s/>\ <text:s text:c="3"/>/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70 <text:s/>60 50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4">陣列：</text:span><text:span text:style-name="T23">[100, 90, 80, 70, 60, 50]</text:span>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Step 1</text:span><text:span text:style-name="T24">：</text:span><text:span text:style-name="T19">插入 </text:span><text:span text:style-name="T26">95</text:span><text:span text:style-name="T23"> → </text:span><text:span text:style-name="T30">放到 </text:span><text:span text:style-name="T49">index 7</text:span><text:span text:style-name="T30">（最後）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4">陣列：</text:span><text:span text:style-name="T23">[100, 90, 80, 70, 60, 50, 95]</text:span>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Step 2</text:span><text:span text:style-name="T24">：</text:span><text:span text:style-name="T23">95 </text:span><text:span text:style-name="T24">的 </text:span><text:span text:style-name="T23">parent = A[7/2] = A[3] = 80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8"/></text:span><text:span text:style-name="T26">95 &gt; 80</text:span><text:span text:style-name="T23"> → </text:span><text:span text:style-name="T24">違反 </text:span><text:span text:style-name="T23">Max Heap → </text:span><text:span text:style-name="T50">交換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4">陣列：</text:span><text:span text:style-name="T23">[100, 90, </text:span><text:span text:style-name="T51">95</text:span><text:span text:style-name="T23">, 70, 60, 50, </text:span><text:span text:style-name="T51">80</text:span><text:span text:style-name="T23">]</text:span>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Step 3</text:span><text:span text:style-name="T24">：</text:span><text:span text:style-name="T23">95 </text:span><text:span text:style-name="T24">的 </text:span><text:span text:style-name="T23">parent = A[3/2] = A[1] = 100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7"/></text:span><text:span text:style-name="T26"><text:s/>95 &lt; 100</text:span><text:span text:style-name="T23"> → </text:span><text:span text:style-name="T24">符合 </text:span><text:span text:style-name="T23">Max Heap → </text:span><text:span text:style-name="T50">停止</text:span>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ext:soft-page-break/>
        <table:table-row table:style-name="表格7.1">
          <table:table-cell table:style-name="表格7.A1" office:value-type="string">
            <text:p text:style-name="P9" loext:marker-style-name="T22"><text:span text:style-name="T24">最終結果：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8"/>100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7"/>/ <text:s text:c="2"/>\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6"/>90 <text:s text:c="3"/>95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5"/>/ <text:s/>\ <text:s text:c="2"/>/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4"/>70 <text:s/>60 80</text:span><text:span text:style-name="T22"/></text:p>
          </table:table-cell>
        </table:table-row>
      </table:table>
      <text:p text:style-name="P3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9" loext:marker-style-name="T22"><text:span text:style-name="T24">時間複雜度：</text:span><text:span text:style-name="T23">O(log n) <text:s/>← </text:span><text:span text:style-name="T24">最多往上走樹高（</text:span><text:span text:style-name="T23">h = log₂n</text:span><text:span text:style-name="T24">）步</text:span></text:p>
          </table:table-cell>
        </table:table-row>
      </table:table>
      <text:p text:style-name="P3"/>
      <text:p text:style-name="P3"/>
      <text:h text:style-name="P6" text:outline-level="2" loext:marker-style-name="T13"><text:span text:style-name="T15">3-2 </text:span><text:span text:style-name="T52">刪除最大值</text:span><text:span text:style-name="T14">（</text:span><text:span text:style-name="T15">Delete / Extract-Max</text:span><text:span text:style-name="T14">）— </text:span><text:span text:style-name="T15">Heapify</text:span><text:span text:style-name="T14">（向下沉）</text:span></text:h>
      <text:p text:style-name="P5" loext:marker-style-name="T10"><text:span text:style-name="T12">步驟：</text:span><text:span text:style-name="T10"/></text:p>
      <text:list xml:id="list200150657283420" text:continue-list="list200150688734549" text:style-name="WWNum10">
        <text:list-item>
          <text:p text:style-name="P15" loext:marker-style-name="T16"><text:span text:style-name="T43">Step 1</text:span><text:span text:style-name="T18">：</text:span><text:span text:style-name="T44">取出 </text:span><text:span text:style-name="T53">Root</text:span><text:span text:style-name="T44">（最大值）</text:span><text:span text:style-name="T18">。</text:span></text:p>
        </text:list-item>
        <text:list-item text:style-override="WWNum11">
          <text:p text:style-name="P16" loext:marker-style-name="T16"><text:span text:style-name="T43">Step 2</text:span><text:span text:style-name="T18">：</text:span><text:span text:style-name="T54">將陣列最後一個元素移到 </text:span><text:span text:style-name="T39">Root </text:span><text:span text:style-name="T54">位置。</text:span></text:p>
        </text:list-item>
        <text:list-item text:style-override="WWNum12">
          <text:p text:style-name="P17" loext:marker-style-name="T16"><text:span text:style-name="T43">Step 3</text:span><text:span text:style-name="T18">：</text:span><text:span text:style-name="T45">與兩個子節點中</text:span><text:span text:style-name="T55">較大的</text:span><text:span text:style-name="T45">比較</text:span><text:span text:style-name="T18">，若違反 </text:span><text:span text:style-name="T43">Heap Property</text:span><text:span text:style-name="T18">，則交換。</text:span></text:p>
        </text:list-item>
        <text:list-item text:style-override="WWNum13">
          <text:p text:style-name="P18" loext:marker-style-name="T16"><text:span text:style-name="T43">Step 4</text:span><text:span text:style-name="T18">：重複 </text:span><text:span text:style-name="T43">Step 3</text:span><text:span text:style-name="T18">（</text:span><text:span text:style-name="T43">Heapify / Bubble Down</text:span><text:span text:style-name="T18">），一路往下，直到滿足條件或抵達葉節點。</text:span></text:p>
        </text:list-item>
      </text:list>
      <text:p text:style-name="P3"/>
      <text:p text:style-name="P14" loext:marker-style-name="T46"><text:span text:style-name="T47">完整範例：</text:span><text:span text:style-name="T48">Max Heap </text:span><text:span text:style-name="T47">刪除 </text:span><text:span text:style-name="T48">Root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9" loext:marker-style-name="T22"><text:span text:style-name="T24">原始 </text:span><text:span text:style-name="T23">Max Heap</text:span><text:span text:style-name="T24">：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9"/>10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/ <text:s text:c="2"/>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7"/>90 <text:s text:c="3"/>8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6"/>/ \ <text:s text:c="2"/>/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/>70 <text:s/>60 <text:s/>5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/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Step 1</text:span><text:span text:style-name="T24">：取出 </text:span><text:span text:style-name="T23">Root = 100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Step 2</text:span><text:span text:style-name="T24">：把最後元素 </text:span><text:span text:style-name="T23">50 </text:span><text:span text:style-name="T24">移到 </text:span><text:span text:style-name="T23">Root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9"/>5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7"/>90 <text:s text:c="2"/>8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6"/>/ 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4"/>70 <text:s/>60</text:span><text:span text:style-name="T22"/></text:p>
          </table:table-cell>
        </table:table-row>
        <text:soft-page-break/>
        <table:table-row table:style-name="表格9.1">
          <table:table-cell table:style-name="表格9.A1" office:value-type="string">
            <text:p text:style-name="P9"/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Step 3</text:span><text:span text:style-name="T24">：</text:span><text:span text:style-name="T23">50 </text:span><text:span text:style-name="T24">的子節點 </text:span><text:span text:style-name="T23">90</text:span><text:span text:style-name="T24">、</text:span><text:span text:style-name="T23">80</text:span><text:span text:style-name="T24">，較大為 </text:span><text:span text:style-name="T23">90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50 &lt; 90 → </text:span><text:span text:style-name="T24">交換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9"/>9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7"/>50 <text:s text:c="2"/>8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6"/>/ 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4"/>70 <text:s/>6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/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Step 4</text:span><text:span text:style-name="T24">：</text:span><text:span text:style-name="T23">50 </text:span><text:span text:style-name="T24">的子節點 </text:span><text:span text:style-name="T23">70</text:span><text:span text:style-name="T24">、</text:span><text:span text:style-name="T23">60</text:span><text:span text:style-name="T24">，較大為 </text:span><text:span text:style-name="T23">70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50 &lt; 70 → </text:span><text:span text:style-name="T24">交換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9"/>9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7"/>70 <text:s text:c="2"/>8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6"/>/ 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3"/>50 <text:s/>6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/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Step 5</text:span><text:span text:style-name="T24">：</text:span><text:span text:style-name="T23">50 </text:span><text:span text:style-name="T24">已是葉節點 → 停止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4">最終陣列：</text:span><text:span text:style-name="T23">[90, 70, 80, 50, 60]</text:span></text:p>
          </table:table-cell>
        </table:table-row>
      </table:table>
      <text:p text:style-name="P3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9" loext:marker-style-name="T22"><text:span text:style-name="T24">時間複雜度：</text:span><text:span text:style-name="T23">O(log n) <text:s/>← </text:span><text:span text:style-name="T24">最多往下走樹高（</text:span><text:span text:style-name="T23">h = log₂n</text:span><text:span text:style-name="T24">）步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四、建立 </text:span><text:span text:style-name="T56">Heap</text:span><text:span text:style-name="T8">（</text:span><text:span text:style-name="T9">Build Heap</text:span><text:span text:style-name="T8">）</text:span></text:h>
      <text:h text:style-name="P6" text:outline-level="2" loext:marker-style-name="T13"><text:span text:style-name="T14">方法 </text:span><text:span text:style-name="T57">A</text:span><text:span text:style-name="T14">：逐個插入法</text:span></text:h>
      <text:p text:style-name="P5" loext:marker-style-name="T58"><text:span text:style-name="T59">從</text:span><text:span text:style-name="T60">空</text:span><text:span text:style-name="T59"> </text:span><text:span text:style-name="T61">Heap</text:span><text:span text:style-name="T62"> </text:span><text:span text:style-name="T59">開始，呼叫 </text:span><text:span text:style-name="T63">n </text:span><text:span text:style-name="T64">次 </text:span><text:span text:style-name="T63">Insert</text:span><text:span text:style-name="T59">，每次 </text:span><text:span text:style-name="T65">O(log n)</text:span><text:span text:style-name="T59">。</text:span>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9" loext:marker-style-name="T22"><text:span text:style-name="T66">總時間：</text:span><text:span text:style-name="T67">n × O(log n)</text:span><text:span text:style-name="T23"> = O(n log n)</text:span></text:p>
          </table:table-cell>
        </table:table-row>
      </table:table>
      <text:p text:style-name="P3"/>
      <text:h text:style-name="P6" text:outline-level="2" loext:marker-style-name="T13"><text:span text:style-name="T14">方法 </text:span><text:span text:style-name="T57">B</text:span><text:span text:style-name="T14">：</text:span><text:span text:style-name="T15">Bottom-Up Build Heap</text:span><text:span text:style-name="T14">（</text:span><text:span text:style-name="T15">Floyd</text:span><text:span text:style-name="T57"> </text:span><text:span text:style-name="T14">演算法）★考試重點★</text:span></text:h>
      <text:p text:style-name="P5" loext:marker-style-name="T58"><text:span text:style-name="T59">直接</text:span><text:span text:style-name="T68">將 </text:span><text:span text:style-name="T69">n </text:span><text:span text:style-name="T68">個元素放入陣列</text:span><text:span text:style-name="T59">，從</text:span><text:span text:style-name="T60">最後一個非葉節點（</text:span><text:span text:style-name="T70">index = ⌊n/2⌋</text:span><text:span text:style-name="T60">）開始</text:span><text:span text:style-name="T59">，</text:span><text:span text:style-name="T71">由下往上</text:span><text:span text:style-name="T59">逐一執行 </text:span><text:span text:style-name="T62">Heapify</text:span><text:span text:style-name="T59">。</text:span></text:p>
      <text:p text:style-name="P3"><text:soft-page-break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9" loext:marker-style-name="T72"><text:span text:style-name="T72">★ </text:span><text:span text:style-name="T73">為何從 ⌊</text:span><text:span text:style-name="T72">n/2⌋ </text:span><text:span text:style-name="T73">開始？</text:span></text:p>
          </table:table-cell>
        </table:table-row>
        <table:table-row table:style-name="表格12.1">
          <table:table-cell table:style-name="表格12.A1" office:value-type="string">
            <text:p text:style-name="P9" loext:marker-style-name="T22"><text:span text:style-name="T38">index &gt; ⌊n/2⌋ </text:span><text:span text:style-name="T74">的節點全部都是葉節點</text:span><text:span text:style-name="T66">（</text:span><text:span text:style-name="T75">無子節點</text:span><text:span text:style-name="T66">），</text:span></text:p>
          </table:table-cell>
        </table:table-row>
        <table:table-row table:style-name="表格12.1">
          <table:table-cell table:style-name="表格12.A1" office:value-type="string">
            <text:p text:style-name="P9" loext:marker-style-name="T22"><text:span text:style-name="T66">葉節點本身已滿足 </text:span><text:span text:style-name="T23">Heap Property(</text:span><text:span text:style-name="T67">Heap Property</text:span><text:span text:style-name="T76">就是比較父節點</text:span><text:span text:style-name="T67">vs</text:span><text:span text:style-name="T76">子節點</text:span><text:span text:style-name="T66">；</text:span><text:span text:style-name="T77">葉節點沒有孩子 → 沒有東西可以比較 </text:span><text:span text:style-name="T24">→ 一定合法</text:span><text:span text:style-name="T66">。</text:span><text:span text:style-name="T23">)</text:span><text:span text:style-name="T66">，不需要 </text:span><text:span text:style-name="T23">Heapify</text:span><text:span text:style-name="T66">。</text:span></text:p>
          </table:table-cell>
        </table:table-row>
        <table:table-row table:style-name="表格12.1">
          <table:table-cell table:style-name="表格12.A1" office:value-type="string">
            <text:p text:style-name="P9" loext:marker-style-name="T22"><text:span text:style-name="T66">因此</text:span><text:span text:style-name="T78">只需從 </text:span><text:span text:style-name="T39">index ⌊n/2⌋ </text:span><text:span text:style-name="T78">往 </text:span><text:span text:style-name="T39">index 1 </text:span><text:span text:style-name="T78">逐一執行</text:span><text:span text:style-name="T66">。</text:span></text:p>
          </table:table-cell>
        </table:table-row>
      </table:table>
      <text:p text:style-name="P3"/>
      <text:p text:style-name="P5" loext:marker-style-name="T58"><text:span text:style-name="T79">範例：將 </text:span><text:span text:style-name="T80">[50, 30, 80, 10, 20, 70, 90] </text:span><text:span text:style-name="T79">建成 </text:span><text:span text:style-name="T80">Max Heap</text:span></text:p>
      <text:p text:style-name="P3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9" loext:marker-style-name="T22"><text:span text:style-name="T66">初始陣列（</text:span><text:span text:style-name="T23">index </text:span><text:span text:style-name="T66">從 </text:span><text:span text:style-name="T23">1 </text:span><text:span text:style-name="T66">開始）：</text:span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index</text:span><text:span text:style-name="T66">： <text:s/></text:span><text:span text:style-name="T23">1 <text:s text:c="3"/>2 <text:s text:c="3"/>3 <text:s text:c="3"/>4 <text:s text:c="3"/>5 <text:s text:c="3"/>6 <text:s text:c="3"/>7</text:span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value</text:span><text:span text:style-name="T66">： <text:s/></text:span><text:span text:style-name="T23">50 <text:s text:c="2"/>30 <text:s text:c="2"/>80 <text:s text:c="2"/>10 <text:s text:c="2"/>20 <text:s text:c="2"/>70 <text:s text:c="2"/>90</text:span></text:p>
          </table:table-cell>
        </table:table-row>
        <table:table-row table:style-name="表格13.1">
          <table:table-cell table:style-name="表格13.A1" office:value-type="string">
            <text:p text:style-name="P9"/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6">n = 7</text:span><text:span text:style-name="T66">，</text:span><text:span text:style-name="T81">最後非葉節點 </text:span><text:span text:style-name="T82">index = ⌊7/2⌋ = 3</text:span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66">（</text:span><text:span text:style-name="T83">index 4</text:span><text:span text:style-name="T84">、</text:span><text:span text:style-name="T83">5</text:span><text:span text:style-name="T84">、</text:span><text:span text:style-name="T83">6</text:span><text:span text:style-name="T84">、</text:span><text:span text:style-name="T83">7 </text:span><text:span text:style-name="T84">皆為葉節點</text:span><text:span text:style-name="T66">，不需 </text:span><text:span text:style-name="T23">Heapify</text:span><text:span text:style-name="T66">）</text:span></text:p>
          </table:table-cell>
        </table:table-row>
        <table:table-row table:style-name="表格13.1">
          <table:table-cell table:style-name="表格13.A1" office:value-type="string">
            <text:p text:style-name="P9"/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66">初始樹狀結構：</text:span><text:span text:style-name="T22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<text:s text:c="13"/>50</text:span><text:span text:style-name="T22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<text:s text:c="12"/>/ <text:s/>\</text:span><text:span text:style-name="T22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<text:s text:c="8"/>30 <text:s text:c="3"/>80</text:span><text:span text:style-name="T22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<text:s text:c="7"/>/ \ <text:s text:c="6"/>/ \</text:span><text:span text:style-name="T22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<text:s text:c="3"/>10 <text:s/>20 70 <text:s/>90</text:span><text:span text:style-name="T22"/></text:p>
          </table:table-cell>
        </table:table-row>
      </table:table>
      <text:p text:style-name="P3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9" loext:marker-style-name="T22"><text:span text:style-name="T23">→ Heapify(3)</text:span><text:span text:style-name="T66">：</text:span><text:span text:style-name="T23">index 3 = 80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</text:span><text:span text:style-name="T66">子節點：</text:span><text:span text:style-name="T23">index 6 = 70</text:span><text:span text:style-name="T66">，</text:span><text:span text:style-name="T23">index 7 = 90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</text:span><text:span text:style-name="T51">Max Heap </text:span><text:span text:style-name="T85">要求父 ≥ 子</text:span><text:span text:style-name="T66">，但 </text:span><text:span text:style-name="T23">80 &lt; 90 → </text:span><text:span text:style-name="T66">違反！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80 </text:span><text:span text:style-name="T66">與 </text:span><text:span text:style-name="T23">90 </text:span><text:span text:style-name="T66">交換</text:span></text:p>
          </table:table-cell>
        </table:table-row>
        <table:table-row table:style-name="表格14.1">
          <table:table-cell table:style-name="表格14.A1" office:value-type="string">
            <text:p text:style-name="P9"/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</text:span><text:span text:style-name="T66">交換後：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13"/>50</text:span><text:span text:style-name="T22"/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13"/>/ <text:s/>\</text:span><text:span text:style-name="T22"/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8"/>30 <text:s text:c="3"/>90 <text:s text:c="5"/>← 90 </text:span><text:span text:style-name="T66">上來了</text:span></text:p>
          </table:table-cell>
        </table:table-row>
        <text:soft-page-break/>
        <table:table-row table:style-name="表格14.1">
          <table:table-cell table:style-name="表格14.A1" office:value-type="string">
            <text:p text:style-name="P9" loext:marker-style-name="T22"><text:span text:style-name="T23"><text:s text:c="5"/>/ \ <text:s text:c="6"/>/ \</text:span><text:span text:style-name="T22"/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/>10 <text:s/>20 70 <text:s/>80</text:span><text:span text:style-name="T22"/></text:p>
          </table:table-cell>
        </table:table-row>
        <table:table-row table:style-name="表格14.1">
          <table:table-cell table:style-name="表格14.A1" office:value-type="string">
            <text:p text:style-name="P9"/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</text:span><text:span text:style-name="T66">陣列：</text:span><text:span text:style-name="T23">[50, 30, 90, 10, 20, 70, 80]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80 </text:span><text:span text:style-name="T66">已是葉節點 → 停止</text:span></text:p>
          </table:table-cell>
        </table:table-row>
      </table:table>
      <text:p text:style-name="P3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9" loext:marker-style-name="T22"><text:span text:style-name="T23">→ Heapify(2)</text:span><text:span text:style-name="T66">：</text:span><text:span text:style-name="T23">index 2 = 30</text:span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2"/></text:span><text:span text:style-name="T66">子節點：</text:span><text:span text:style-name="T23">index 4 = 10</text:span><text:span text:style-name="T66">，</text:span><text:span text:style-name="T23">index 5 = 20</text:span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2"/>30 ≥ 20 </text:span><text:span text:style-name="T66">且 </text:span><text:span text:style-name="T23">30 ≥ 10 → </text:span><text:span text:style-name="T66">符合 </text:span><text:span text:style-name="T23">Max Heap → </text:span><text:span text:style-name="T66">無需交換</text:span></text:p>
          </table:table-cell>
        </table:table-row>
        <table:table-row table:style-name="表格15.1">
          <table:table-cell table:style-name="表格15.A1" office:value-type="string">
            <text:p text:style-name="P9"/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2"/></text:span><text:span text:style-name="T66">樹狀結構不變：</text:span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11"/>50</text:span><text:span text:style-name="T22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10"/>/ <text:s/>\</text:span><text:span text:style-name="T22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8"/>30 <text:s text:c="3"/>90</text:span><text:span text:style-name="T22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7"/>/ \ <text:s text:c="2"/>/ \</text:span><text:span text:style-name="T22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5"/>10 <text:s/>20 70 <text:s/>80</text:span><text:span text:style-name="T22"/></text:p>
          </table:table-cell>
        </table:table-row>
        <table:table-row table:style-name="表格15.1">
          <table:table-cell table:style-name="表格15.A1" office:value-type="string">
            <text:p text:style-name="P9"/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2"/></text:span><text:span text:style-name="T66">陣列：</text:span><text:span text:style-name="T23">[50, 30, 90, 10, 20, 70, 80]</text:span></text:p>
          </table:table-cell>
        </table:table-row>
      </table:table>
      <text:p text:style-name="P3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9" loext:marker-style-name="T22"><text:span text:style-name="T23">→ Heapify(1)</text:span><text:span text:style-name="T66">：</text:span><text:span text:style-name="T23">index 1 = 50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66">子節點：</text:span><text:span text:style-name="T23">index 2 = 30</text:span><text:span text:style-name="T66">，</text:span><text:span text:style-name="T23">index 3 = 90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74">較大子節點</text:span><text:span text:style-name="T66">為 </text:span><text:span text:style-name="T23">90 &gt; 50 → </text:span><text:span text:style-name="T26">50 </text:span><text:span text:style-name="T86">與 </text:span><text:span text:style-name="T26">90 </text:span><text:span text:style-name="T86">交換</text:span></text:p>
          </table:table-cell>
        </table:table-row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66">第 </text:span><text:span text:style-name="T23">1 </text:span><text:span text:style-name="T66">步交換後：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11"/>90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10"/>/ <text:s/>\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8"/>30 <text:s text:c="3"/>50 <text:s text:c="5"/>← 50 </text:span><text:span text:style-name="T66">下沉到 </text:span><text:span text:style-name="T23">index 3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7"/>/ \ <text:s text:c="2"/>/ \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5"/>10 <text:s/>20 70 <text:s/>80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66">陣列：</text:span><text:span text:style-name="T23">[90, 30, 50, 10, 20, 70, 80]</text:span></text:p>
          </table:table-cell>
        </table:table-row>
        <text:soft-page-break/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53">50 </text:span><text:span text:style-name="T77">繼續下沉</text:span><text:span text:style-name="T66">：子節點 </text:span><text:span text:style-name="T23">index 6 = 70</text:span><text:span text:style-name="T66">，</text:span><text:span text:style-name="T23">index 7 = 80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74">較大子節點</text:span><text:span text:style-name="T66">為 </text:span><text:span text:style-name="T23">80 &gt; 50 → 50 </text:span><text:span text:style-name="T66">與 </text:span><text:span text:style-name="T23">80 </text:span><text:span text:style-name="T66">交換</text:span></text:p>
          </table:table-cell>
        </table:table-row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66">第 </text:span><text:span text:style-name="T23">2 </text:span><text:span text:style-name="T66">步交換後：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11"/>90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10"/>/ <text:s/>\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8"/>30 <text:s text:c="3"/>80 <text:s text:c="5"/>← 80 </text:span><text:span text:style-name="T66">上來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7"/>/ \ <text:s text:c="2"/>/ \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5"/>10 <text:s/>20 70 <text:s/>50 <text:s text:c="3"/>← 50 </text:span><text:span text:style-name="T66">落到葉節點</text:span></text:p>
          </table:table-cell>
        </table:table-row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50 </text:span><text:span text:style-name="T66">已是葉節點 → 停止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66">陣列：</text:span><text:span text:style-name="T23">[90, 30, 80, 10, 20, 70, 50]</text:span></text:p>
          </table:table-cell>
        </table:table-row>
      </table:table>
      <text:p text:style-name="P3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9" loext:marker-style-name="T22"><text:span text:style-name="T66">最終結果：</text:span><text:span text:style-name="T23">Max Heap ✓</text:span></text:p>
          </table:table-cell>
        </table:table-row>
        <table:table-row table:style-name="表格17.1">
          <table:table-cell table:style-name="表格17.A1" office:value-type="string">
            <text:p text:style-name="P9"/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23"><text:s text:c="11"/>90</text:span><text:span text:style-name="T22"/></text:p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23"><text:s text:c="10"/>/ <text:s/>\</text:span><text:span text:style-name="T22"/></text:p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23"><text:s text:c="8"/>30 <text:s text:c="3"/>80</text:span><text:span text:style-name="T22"/></text:p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23"><text:s text:c="7"/>/ \ <text:s text:c="2"/>/ \</text:span><text:span text:style-name="T22"/></text:p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23"><text:s text:c="5"/>10 <text:s/>20 70 <text:s/>50</text:span><text:span text:style-name="T22"/></text:p>
          </table:table-cell>
        </table:table-row>
        <table:table-row table:style-name="表格17.1">
          <table:table-cell table:style-name="表格17.A1" office:value-type="string">
            <text:p text:style-name="P9"/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66">陣列：</text:span><text:span text:style-name="T23">[90, 30, 80, 10, 20, 70, 50]</text:span></text:p>
          </table:table-cell>
        </table:table-row>
      </table:table>
      <text:p text:style-name="P3"/>
      <text:h text:style-name="P6" text:outline-level="2" loext:marker-style-name="T13"><text:span text:style-name="T57">★ </text:span><text:span text:style-name="T52">為何 </text:span><text:span text:style-name="T87">Bottom-Up Build Heap</text:span><text:span text:style-name="T88"> =</text:span><text:span text:style-name="T57"> </text:span><text:span text:style-name="T89">O(n)</text:span><text:span text:style-name="T14">？</text:span></text:h>
      <text:p text:style-name="P5" loext:marker-style-name="T58"><text:span text:style-name="T59">關鍵直覺：</text:span><text:span text:style-name="T71">每個節點 </text:span><text:span text:style-name="T90">Heapify </text:span><text:span text:style-name="T71">的代價 </text:span><text:span text:style-name="T90">= </text:span><text:span text:style-name="T71">它在樹中的「高度」</text:span><text:span text:style-name="T59">（</text:span><text:span text:style-name="T91">往下最多能走幾層</text:span><text:span text:style-name="T59">）。</text:span></text:p>
      <text:p text:style-name="P5" loext:marker-style-name="T58"><text:span text:style-name="T59">高度愈低的節點數量愈多，代價愈小；高度愈高的節點數量愈少，代價愈大。兩者相乘加總後收斂至 </text:span><text:span text:style-name="T62">O(n)</text:span><text:span text:style-name="T59">。</text:span></text:p>
      <text:p text:style-name="P3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9" loext:marker-style-name="T22"><text:span text:style-name="T66">數學推導（高度加總法）：</text:span><text:span text:style-name="T92">(</text:span><text:span text:style-name="T93">後補</text:span><text:span text:style-name="T92">)</text:span></text:p>
          </table:table-cell>
        </table:table-row>
        <text:soft-page-break/>
        <table:table-row table:style-name="表格18.1">
          <table:table-cell table:style-name="表格18.A1" office:value-type="string">
            <text:p text:style-name="P9"/>
          </table:table-cell>
        </table:table-row>
        <table:table-row table:style-name="表格18.1">
          <table:table-cell table:style-name="表格18.A1" office:value-type="string">
            <text:p text:style-name="P9" loext:marker-style-name="T22"><text:span text:style-name="T23"><text:s text:c="2"/></text:span><text:span text:style-name="T66">高度為 </text:span><text:span text:style-name="T23">h </text:span><text:span text:style-name="T66">的節點數量 ≤ ⌈</text:span><text:span text:style-name="T23">n / 2^(h+1)⌉</text:span></text:p>
          </table:table-cell>
        </table:table-row>
        <table:table-row table:style-name="表格18.1">
          <table:table-cell table:style-name="表格18.A1" office:value-type="string">
            <text:p text:style-name="P9" loext:marker-style-name="T22"><text:span text:style-name="T23"><text:s text:c="2"/></text:span><text:span text:style-name="T66">每個高度 </text:span><text:span text:style-name="T23">h </text:span><text:span text:style-name="T66">的節點，</text:span><text:span text:style-name="T23">Heapify </text:span><text:span text:style-name="T66">最多走 </text:span><text:span text:style-name="T23">h </text:span><text:span text:style-name="T66">步</text:span></text:p>
          </table:table-cell>
        </table:table-row>
        <table:table-row table:style-name="表格18.1">
          <table:table-cell table:style-name="表格18.A1" office:value-type="string">
            <text:p text:style-name="P9"/>
          </table:table-cell>
        </table:table-row>
        <table:table-row table:style-name="表格18.1">
          <table:table-cell table:style-name="表格18.A1" office:value-type="string">
            <text:p text:style-name="P9" loext:marker-style-name="T22"><text:span text:style-name="T23"><text:s text:c="2"/>T(n) = Σ(h=0 </text:span><text:span text:style-name="T66">到 ⌊</text:span><text:span text:style-name="T23">log n⌋) <text:s/>⌈n/2^(h+1)⌉ × h</text:span></text:p>
          </table:table-cell>
        </table:table-row>
        <table:table-row table:style-name="表格18.1">
          <table:table-cell table:style-name="表格18.A1" office:value-type="string">
            <text:p text:style-name="P9" loext:marker-style-name="T22"><text:span text:style-name="T23"><text:s text:c="7"/>≤ n × Σ(h=0 </text:span><text:span text:style-name="T66">到 ∞</text:span><text:span text:style-name="T23">) <text:s/>h / 2^h</text:span></text:p>
          </table:table-cell>
        </table:table-row>
        <table:table-row table:style-name="表格18.1">
          <table:table-cell table:style-name="表格18.A1" office:value-type="string">
            <text:p text:style-name="P9" loext:marker-style-name="T22"><text:span text:style-name="T23"><text:s text:c="7"/>= n × 2 <text:s/>= <text:s/>O(n)</text:span><text:span text:style-name="T22"/></text:p>
          </table:table-cell>
        </table:table-row>
        <table:table-row table:style-name="表格18.1">
          <table:table-cell table:style-name="表格18.A1" office:value-type="string">
            <text:p text:style-name="P9"/>
          </table:table-cell>
        </table:table-row>
        <table:table-row table:style-name="表格18.1">
          <table:table-cell table:style-name="表格18.A1" office:value-type="string">
            <text:p text:style-name="P9" loext:marker-style-name="T22"><text:span text:style-name="T23"><text:s text:c="2"/></text:span><text:span text:style-name="T66">（∑ </text:span><text:span text:style-name="T23">h/2^h </text:span><text:span text:style-name="T66">是收斂等比級數，值為 </text:span><text:span text:style-name="T23">2</text:span><text:span text:style-name="T66">）</text:span></text:p>
          </table:table-cell>
        </table:table-row>
        <table:table-row table:style-name="表格18.1">
          <table:table-cell table:style-name="表格18.A1" office:value-type="string">
            <text:p text:style-name="P9"/>
          </table:table-cell>
        </table:table-row>
        <table:table-row table:style-name="表格18.1">
          <table:table-cell table:style-name="表格18.A1" office:value-type="string">
            <text:p text:style-name="P9" loext:marker-style-name="T22"><text:span text:style-name="T66">白話理解：葉節點約佔一半，</text:span><text:span text:style-name="T23">Heapify </text:span><text:span text:style-name="T66">代價為 </text:span><text:span text:style-name="T23">0</text:span><text:span text:style-name="T66">；</text:span></text:p>
          </table:table-cell>
        </table:table-row>
        <table:table-row table:style-name="表格18.1">
          <table:table-cell table:style-name="表格18.A1" office:value-type="string">
            <text:p text:style-name="P9" loext:marker-style-name="T94"><text:span text:style-name="T95">往上每層節點數減半，代價只加 </text:span><text:span text:style-name="T94">1</text:span><text:span text:style-name="T95">。</text:span></text:p>
          </table:table-cell>
        </table:table-row>
        <table:table-row table:style-name="表格18.1">
          <table:table-cell table:style-name="表格18.A1" office:value-type="string">
            <text:p text:style-name="P9" loext:marker-style-name="T22"><text:span text:style-name="T96">整體工作量被大量葉節點的「零代價」攤平</text:span><text:span text:style-name="T66">，總代價 ∝ </text:span><text:span text:style-name="T23">n</text:span><text:span text:style-name="T66">。</text:span></text:p>
          </table:table-cell>
        </table:table-row>
      </table:table>
      <text:p text:style-name="P3"/>
      <table:table table:name="表格19" table:style-name="表格19">
        <table:table-column table:style-name="表格19.A" table:number-columns-repeated="3"/>
        <table:table-header-rows>
          <table:table-row table:style-name="表格19.1">
            <table:table-cell table:style-name="表格19.A1" office:value-type="string">
              <text:p text:style-name="P10" loext:marker-style-name="T27"><text:span text:style-name="T28">方法</text:span><text:span text:style-name="T27"/></text:p>
            </table:table-cell>
            <table:table-cell table:style-name="表格19.A1" office:value-type="string">
              <text:p text:style-name="P10" loext:marker-style-name="T27"><text:span text:style-name="T28">時間複雜度</text:span><text:span text:style-name="T27"/></text:p>
            </table:table-cell>
            <table:table-cell table:style-name="表格19.A1" office:value-type="string">
              <text:p text:style-name="P10" loext:marker-style-name="T27"><text:span text:style-name="T28">適用情境</text:span><text:span text:style-name="T27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10" loext:marker-style-name="T97"><text:span text:style-name="T98">逐個 </text:span><text:span text:style-name="T97">Insert</text:span></text:p>
          </table:table-cell>
          <table:table-cell table:style-name="表格19.A2" office:value-type="string">
            <text:p text:style-name="P10" loext:marker-style-name="T22"><text:span text:style-name="T23">O(</text:span><text:span text:style-name="T26">n log n</text:span><text:span text:style-name="T23">)</text:span></text:p>
          </table:table-cell>
          <table:table-cell table:style-name="表格19.A2" office:value-type="string">
            <text:p text:style-name="P10" loext:marker-style-name="T22"><text:span text:style-name="T66">動態逐一加入</text:span><text:span text:style-name="T22"/></text:p>
          </table:table-cell>
        </table:table-row>
        <table:table-row table:style-name="表格19.1">
          <table:table-cell table:style-name="表格19.A3" office:value-type="string">
            <text:p text:style-name="P10" loext:marker-style-name="T97"><text:span text:style-name="T97">Bottom-Up Build Heap</text:span><text:span text:style-name="T97"/></text:p>
          </table:table-cell>
          <table:table-cell table:style-name="表格19.A3" office:value-type="string">
            <text:p text:style-name="P10" loext:marker-style-name="T22"><text:span text:style-name="T23">O(</text:span><text:span text:style-name="T26">n</text:span><text:span text:style-name="T23">) ★</text:span></text:p>
          </table:table-cell>
          <table:table-cell table:style-name="表格19.A3" office:value-type="string">
            <text:p text:style-name="P10" loext:marker-style-name="T22"><text:span text:style-name="T66">一次性建立</text:span><text:span text:style-name="T22"/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五、</text:span><text:span text:style-name="T9">Heap Sort</text:span><text:span text:style-name="T8">（堆積排序）</text:span></text:h>
      <text:p text:style-name="P5" loext:marker-style-name="T58"><text:span text:style-name="T62">Heap Sort </text:span><text:span text:style-name="T59">利用 </text:span><text:span text:style-name="T62">Heap </text:span><text:span text:style-name="T59">結構進行排序，分為兩個階段：</text:span></text:p>
      <text:p text:style-name="P3"/>
      <text:list xml:id="list2604793170" text:style-name="WWNum2">
        <text:list-item>
          <text:p text:style-name="P19" loext:marker-style-name="T58"><text:span text:style-name="T62">Phase 1</text:span><text:span text:style-name="T59">：</text:span><text:span text:style-name="T99">Build Heap</text:span><text:span text:style-name="T62"> — </text:span><text:span text:style-name="T100">將原始陣列建成 </text:span><text:span text:style-name="T101">Max Heap</text:span><text:span text:style-name="T59">，時間 </text:span><text:span text:style-name="T62">O(n)</text:span><text:span text:style-name="T59">。</text:span></text:p>
        </text:list-item>
        <text:list-item>
          <text:p text:style-name="P19" loext:marker-style-name="T58"><text:span text:style-name="T62">Phase 2</text:span><text:span text:style-name="T59">：</text:span><text:span text:style-name="T60">反覆 </text:span><text:span text:style-name="T70">Extract-Max</text:span><text:span text:style-name="T62"> — </text:span><text:span text:style-name="T102">取出 </text:span><text:span text:style-name="T103">Root</text:span><text:span text:style-name="T102">（最大值），放到陣列末端</text:span><text:span text:style-name="T59">，</text:span><text:span text:style-name="T104">再 </text:span><text:span text:style-name="T61">Heapify</text:span><text:span text:style-name="T59">，重複 </text:span><text:span text:style-name="T105">n-1</text:span><text:span text:style-name="T62"> </text:span><text:span text:style-name="T59">次，每次 </text:span><text:span text:style-name="T62">O(</text:span><text:span text:style-name="T90">log n</text:span><text:span text:style-name="T62">)</text:span><text:span text:style-name="T59">。</text:span></text:p>
        </text:list-item>
      </text:list>
      <text:p text:style-name="P3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9" loext:marker-style-name="T22"><text:span text:style-name="T23">Heap Sort </text:span><text:span text:style-name="T66">總時間 </text:span><text:span text:style-name="T23">= O(</text:span><text:span text:style-name="T26">n</text:span><text:span text:style-name="T23">) + O(</text:span><text:span text:style-name="T26">n log n</text:span><text:span text:style-name="T23">) = O(</text:span><text:span text:style-name="T67">n log n</text:span><text:span text:style-name="T23">)</text:span></text:p>
          </table:table-cell>
        </table:table-row>
        <table:table-row table:style-name="表格20.1">
          <table:table-cell table:style-name="表格20.A1" office:value-type="string">
            <text:p text:style-name="P9" loext:marker-style-name="T22"><text:span text:style-name="T66">空間複雜度 </text:span><text:span text:style-name="T23">= O(1)</text:span><text:span text:style-name="T66">（</text:span><text:span text:style-name="T23">In-place</text:span><text:span text:style-name="T66">，不需額外陣列）</text:span></text:p>
          </table:table-cell>
        </table:table-row>
        <table:table-row table:style-name="表格20.1">
          <table:table-cell table:style-name="表格20.A1" office:value-type="string">
            <text:p text:style-name="P9" loext:marker-style-name="T22"><text:span text:style-name="T66">穩定性 </text:span><text:span text:style-name="T23">= </text:span><text:span text:style-name="T66">不穩定（</text:span><text:span text:style-name="T23">Unstable</text:span><text:span text:style-name="T66">）</text:span></text:p>
          </table:table-cell>
        </table:table-row>
      </table:table>
      <text:p text:style-name="P3"/>
      <text:p text:style-name="P5" loext:marker-style-name="T58"><text:span text:style-name="T79">範例：對 </text:span><text:span text:style-name="T80">[4, 2, 7, 1, 5] </text:span><text:span text:style-name="T79">排序</text:span></text:p>
      <text:p text:style-name="P3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9" loext:marker-style-name="T22"><text:span text:style-name="T23">Phase 1 — </text:span><text:span text:style-name="T97">Build Max Heap</text:span><text:span text:style-name="T66">：</text:span></text:p>
          </table:table-cell>
        </table:table-row>
        <text:soft-page-break/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66">原始：</text:span><text:span text:style-name="T23">[4, 2, 7, 1, 5]</text:span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6">n=5</text:span><text:span text:style-name="T66">，</text:span><text:span text:style-name="T106">最後非葉節點 </text:span><text:span text:style-name="T40">= </text:span><text:span text:style-name="T38">⌊5/2⌋ = 2</text:span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66">初始樹狀：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8"/>4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5"/></text:span><text:span text:style-name="T38"><text:s/>2</text:span><text:span text:style-name="T23"> <text:s text:c="2"/>7</text:span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5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4"/>1 <text:s text:c="2"/>5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39">Heapify(2)</text:span><text:span text:style-name="T66">：</text:span><text:span text:style-name="T26">2 </text:span><text:span text:style-name="T86">的子節點 </text:span><text:span text:style-name="T26">1, 5</text:span><text:span text:style-name="T66">；</text:span><text:span text:style-name="T67">5 &gt; 2 → </text:span><text:span text:style-name="T76">交換</text:span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8"/>4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6"/>5 <text:s text:c="2"/>7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5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4"/>1 <text:s text:c="2"/>2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39">Heapify(1)</text:span><text:span text:style-name="T66">：</text:span><text:span text:style-name="T26">4 </text:span><text:span text:style-name="T86">的子節點 </text:span><text:span text:style-name="T26">5, 7</text:span><text:span text:style-name="T66">；</text:span><text:span text:style-name="T67">7 &gt; 4 → </text:span><text:span text:style-name="T76">交換</text:span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8"/>7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6"/>5 <text:s text:c="2"/>4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5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4"/>1 <text:s text:c="2"/>2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Max Heap </text:span><text:span text:style-name="T66">完成：</text:span><text:span text:style-name="T23">[7, 5, 4, 1, 2]</text:span></text:p>
          </table:table-cell>
        </table:table-row>
      </table:table>
      <text:p text:style-name="P3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9" loext:marker-style-name="T22"><text:span text:style-name="T23">Phase 2 — </text:span><text:span text:style-name="T107">反覆</text:span><text:span text:style-name="T66"> </text:span><text:span text:style-name="T38">Extract-Max</text:span><text:span text:style-name="T66">：</text:span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ext:soft-page-break/>
        <table:table-row table:style-name="表格22.1">
          <table:table-cell table:style-name="表格22.A1" office:value-type="string">
            <text:p text:style-name="P9" loext:marker-style-name="T22"><text:span text:style-name="T23">Step 1</text:span><text:span text:style-name="T66">：取出 </text:span><text:span text:style-name="T23">Root=7</text:span><text:span text:style-name="T66">，末端 </text:span><text:span text:style-name="T23">2 </text:span><text:span text:style-name="T66">移到 </text:span><text:span text:style-name="T23">Root</text:span><text:span text:style-name="T66">，</text:span><text:span text:style-name="T23">Heapify</text:span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2"/>→ [5, 2, 4, 1 | 7]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8"/>5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6"/>2 <text:s text:c="2"/>4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5"/>/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4"/>1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Step 2</text:span><text:span text:style-name="T66">：取出 </text:span><text:span text:style-name="T23">Root=5</text:span><text:span text:style-name="T66">，末端 </text:span><text:span text:style-name="T23">1 </text:span><text:span text:style-name="T66">移到 </text:span><text:span text:style-name="T23">Root</text:span><text:span text:style-name="T66">，</text:span><text:span text:style-name="T23">Heapify</text:span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2"/>→ [4, 2, 1 | 5, 7]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8"/>4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6"/>2 <text:s text:c="2"/>1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Step 3</text:span><text:span text:style-name="T66">：取出 </text:span><text:span text:style-name="T23">Root=4</text:span><text:span text:style-name="T66">，末端 </text:span><text:span text:style-name="T23">1 </text:span><text:span text:style-name="T66">移到 </text:span><text:span text:style-name="T23">Root</text:span><text:span text:style-name="T66">，</text:span><text:span text:style-name="T23">Heapify</text:span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2"/>→ [2, 1 | 4, 5, 7]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8"/>2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7"/>/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6"/>1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Step 4</text:span><text:span text:style-name="T66">：取出 </text:span><text:span text:style-name="T23">Root=2</text:span><text:span text:style-name="T66">，末端 </text:span><text:span text:style-name="T23">1 </text:span><text:span text:style-name="T66">移到 </text:span><text:span text:style-name="T23">Root</text:span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2"/>→ [1 | 2, 4, 5, 7]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8"/>1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53"><text:span text:style-name="T77">最終排序（升冪）：</text:span><text:span text:style-name="T53">[1, 2, 4, 5, 7] ✓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六、優先佇列（</text:span><text:span text:style-name="T9">Priority Queue</text:span><text:span text:style-name="T8">）實作方式比較</text:span></text:h>
      <text:p text:style-name="P5" loext:marker-style-name="T58"><text:span text:style-name="T103">Priority Queue</text:span><text:span text:style-name="T102">（優先佇列）</text:span><text:span text:style-name="T59">是</text:span><text:span text:style-name="T91">每次取出「優先值最高」元素的資料結構</text:span><text:span text:style-name="T59">。三種常見實作比較：</text:span></text:p>
      <text:p text:style-name="P3"/>
      <table:table table:name="表格23" table:style-name="表格23">
        <table:table-column table:style-name="表格23.A" table:number-columns-repeated="3"/>
        <table:table-header-rows>
          <text:soft-page-break/>
          <table:table-row table:style-name="表格23.1">
            <table:table-cell table:style-name="表格23.A1" office:value-type="string">
              <text:p text:style-name="P10" loext:marker-style-name="T27"><text:span text:style-name="T28">實作方式</text:span><text:span text:style-name="T27"/></text:p>
            </table:table-cell>
            <table:table-cell table:style-name="表格23.A1" office:value-type="string">
              <text:p text:style-name="P10" loext:marker-style-name="T27"><text:span text:style-name="T108">Insert</text:span><text:span text:style-name="T27"/></text:p>
            </table:table-cell>
            <table:table-cell table:style-name="表格23.A1" office:value-type="string">
              <text:p text:style-name="P10" loext:marker-style-name="T27"><text:span text:style-name="T108">Extract-Max</text:span><text:span text:style-name="T28">（取最大）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10" loext:marker-style-name="T22"><text:span text:style-name="T98">排序好的</text:span><text:span text:style-name="T66">陣列</text:span></text:p>
          </table:table-cell>
          <table:table-cell table:style-name="表格23.A2" office:value-type="string">
            <text:p text:style-name="P10" loext:marker-style-name="T22"><text:span text:style-name="T23">O(n)</text:span><text:span text:style-name="T22"/></text:p>
          </table:table-cell>
          <table:table-cell table:style-name="表格23.A2" office:value-type="string">
            <text:p text:style-name="P10" loext:marker-style-name="T22"><text:span text:style-name="T23">O(1) <text:s/></text:span><text:span text:style-name="T66">取快插慢</text:span></text:p>
          </table:table-cell>
        </table:table-row>
        <table:table-row table:style-name="表格23.1">
          <table:table-cell table:style-name="表格23.A2" office:value-type="string">
            <text:p text:style-name="P10" loext:marker-style-name="T22"><text:span text:style-name="T98">未排序的</text:span><text:span text:style-name="T66">陣列</text:span></text:p>
          </table:table-cell>
          <table:table-cell table:style-name="表格23.A2" office:value-type="string">
            <text:p text:style-name="P10" loext:marker-style-name="T22"><text:span text:style-name="T23">O(1)</text:span><text:span text:style-name="T22"/></text:p>
          </table:table-cell>
          <table:table-cell table:style-name="表格23.A2" office:value-type="string">
            <text:p text:style-name="P10" loext:marker-style-name="T22"><text:span text:style-name="T23">O(n) <text:s/></text:span><text:span text:style-name="T66">插快取慢</text:span></text:p>
          </table:table-cell>
        </table:table-row>
        <table:table-row table:style-name="表格23.1">
          <table:table-cell table:style-name="表格23.A4" office:value-type="string">
            <text:p text:style-name="P10" loext:marker-style-name="T22"><text:span text:style-name="T23">Max Heap ★</text:span><text:span text:style-name="T22"/></text:p>
          </table:table-cell>
          <table:table-cell table:style-name="表格23.A4" office:value-type="string">
            <text:p text:style-name="P10" loext:marker-style-name="T67"><text:span text:style-name="T67">O(log n)</text:span><text:span text:style-name="T67"/></text:p>
          </table:table-cell>
          <table:table-cell table:style-name="表格23.A4" office:value-type="string">
            <text:p text:style-name="P10" loext:marker-style-name="T22"><text:span text:style-name="T39">O(log n)</text:span><text:span text:style-name="T23"> <text:s/></text:span><text:span text:style-name="T66">兩者均衡</text:span></text:p>
          </table:table-cell>
        </table:table-row>
      </table:table>
      <text:p text:style-name="P3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9" loext:marker-style-name="T22"><text:span text:style-name="T23">💡 </text:span><text:span text:style-name="T66">考試重點：</text:span></text:p>
          </table:table-cell>
        </table:table-row>
        <table:table-row table:style-name="表格24.1">
          <table:table-cell table:style-name="表格24.A1" office:value-type="string">
            <text:p text:style-name="P9" loext:marker-style-name="T22"><text:span text:style-name="T38">Heap </text:span><text:span text:style-name="T74">是 </text:span><text:span text:style-name="T38">Priority Queue </text:span><text:span text:style-name="T74">最常見的實作</text:span><text:span text:style-name="T66">，</text:span></text:p>
          </table:table-cell>
        </table:table-row>
        <table:table-row table:style-name="表格24.1">
          <table:table-cell table:style-name="表格24.A1" office:value-type="string">
            <text:p text:style-name="P9" loext:marker-style-name="T22"><text:span text:style-name="T66">原因是 </text:span><text:span text:style-name="T67">Insert </text:span><text:span text:style-name="T76">和 </text:span><text:span text:style-name="T67">Extract </text:span><text:span text:style-name="T76">都是 </text:span><text:span text:style-name="T67">O(log n)</text:span><text:span text:style-name="T66">，</text:span></text:p>
          </table:table-cell>
        </table:table-row>
        <table:table-row table:style-name="表格24.1">
          <table:table-cell table:style-name="表格24.A1" office:value-type="string">
            <text:p text:style-name="P9" loext:marker-style-name="T22"><text:span text:style-name="T66">是</text:span><text:span text:style-name="T77">三種方案中最均衡的折衷解</text:span><text:span text:style-name="T66">。</text:span></text:p>
          </table:table-cell>
        </table:table-row>
        <table:table-row table:style-name="表格24.1">
          <table:table-cell table:style-name="表格24.A1" office:value-type="string">
            <text:p text:style-name="P9"/>
          </table:table-cell>
        </table:table-row>
        <table:table-row table:style-name="表格24.1">
          <table:table-cell table:style-name="表格24.A1" office:value-type="string">
            <text:p text:style-name="P9" loext:marker-style-name="T22"><text:span text:style-name="T66">應用場景：印表機緩衝（高優先文件先印）、作業系統 </text:span><text:span text:style-name="T23">CPU </text:span><text:span text:style-name="T66">排程。</text:span></text:p>
          </table:table-cell>
        </table:table-row>
      </table:table>
      <text:p text:style-name="P3"/>
      <text:p text:style-name="P3"/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9" loext:marker-style-name="T22"><text:span text:style-name="T23">① </text:span><text:span text:style-name="T98">排序好的</text:span><text:span text:style-name="T66">陣列（維持升冪）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Insert 50</text:span><text:span text:style-name="T66">：需找到正確位置並挪動元素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Before: <text:s/>[10, 30, 70, 80]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</text:span><text:span text:style-name="T66">挪動 </text:span><text:span text:style-name="T23">70, 80 </text:span><text:span text:style-name="T66">後</text:span><text:span text:style-name="T23">: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After: <text:s text:c="2"/>[10, 30, </text:span><text:span text:style-name="T51">50</text:span><text:span text:style-name="T23">, 70, 80] <text:s text:c="2"/>← </text:span><text:span text:style-name="T26">O(n)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Extract-Max</text:span><text:span text:style-name="T66">：直接取末端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Before: <text:s/>[10, 30, 50, 70, 80]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After: <text:s text:c="2"/>[10, 30, 50, 70] <text:s text:c="2"/></text:span><text:span text:style-name="T66">取出 </text:span><text:span text:style-name="T23">80 <text:s text:c="2"/>←</text:span><text:span text:style-name="T26"> O(1)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② </text:span><text:span text:style-name="T98">未排序的</text:span><text:span text:style-name="T66">陣列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Insert 50</text:span><text:span text:style-name="T66">：直接放末端，不管順序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Before: <text:s/>[80, 10, 30, 70]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After: <text:s text:c="2"/>[80, 10, 30, 70, 50] <text:s text:c="2"/>← </text:span><text:span text:style-name="T26">O(1)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ext:soft-page-break/>
        <table:table-row table:style-name="表格25.1">
          <table:table-cell table:style-name="表格25.A1" office:value-type="string">
            <text:p text:style-name="P9" loext:marker-style-name="T22"><text:span text:style-name="T23">Extract-Max</text:span><text:span text:style-name="T66">：沒有順序，只能全部掃描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Before: <text:s/>[80, 10, 30, 70, 50]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</text:span><text:span text:style-name="T66">掃描</text:span><text:span text:style-name="T23">: 80? 10? 30? 70? 50? <text:s/>→ </text:span><text:span text:style-name="T66">找到 </text:span><text:span text:style-name="T23">80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After: <text:s text:c="2"/>[10, 30, 70, 50] <text:s text:c="2"/></text:span><text:span text:style-name="T66">取出 </text:span><text:span text:style-name="T23">80 <text:s text:c="2"/>← </text:span><text:span text:style-name="T26">O(n)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③ Max Heap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Insert 50</text:span><text:span text:style-name="T66">：放末端，</text:span><text:span text:style-name="T23">Bubble Up </text:span><text:span text:style-name="T66">往上比較交換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9"/>80 <text:s text:c="16"/>80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9"/>/ <text:s/>\ <text:s text:c="15"/>/ <text:s text:c="2"/>\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6"/>70 <text:s text:c="2"/>30 <text:s text:c="3"/>→ <text:s/>70 <text:s text:c="2"/>30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6"/>/ <text:s text:c="18"/>/ <text:s text:c="2"/>\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4"/>10 <text:s text:c="14"/>10 <text:s text:c="2"/>50 ← </text:span><text:span text:style-name="T53">50 </text:span><text:span text:style-name="T77">直接就合法，停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61"/></text:span><text:span text:style-name="T67">O(log n)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Extract-Max</text:span><text:span text:style-name="T66">：</text:span><text:span text:style-name="T75">取出 </text:span><text:span text:style-name="T109">Root=80</text:span><text:span text:style-name="T66">，</text:span><text:span text:style-name="T73">末端</text:span><text:span text:style-name="T66"> </text:span><text:span text:style-name="T23">50 </text:span><text:span text:style-name="T73">補位</text:span><text:span text:style-name="T66">，</text:span><text:span text:style-name="T23">Heapify </text:span><text:span text:style-name="T66">往下交換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9"/>80 <text:s text:c="16"/>50 <text:s text:c="17"/>70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8"/>/ <text:s text:c="2"/>\ <text:s text:c="15"/>/ <text:s text:c="2"/>\ <text:s text:c="16"/>/ <text:s text:c="2"/>\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5"/>70 <text:s text:c="2"/>30 <text:s text:c="2"/>→ <text:s text:c="3"/>70 <text:s text:c="2"/>30 <text:s text:c="3"/>→ <text:s text:c="3"/>50 <text:s text:c="2"/>30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5"/>/ <text:s text:c="2"/>\ <text:s text:c="15"/>/ <text:s text:c="20"/>/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10 <text:s text:c="2"/>50 <text:s text:c="9"/>10 <text:s text:c="18"/>10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3"/></text:span><text:span text:style-name="T66">取出 </text:span><text:span text:style-name="T23">80 <text:s text:c="5"/>50 </text:span><text:span text:style-name="T66">移到 </text:span><text:span text:style-name="T23">Root <text:s text:c="4"/>Heapify </text:span><text:span text:style-name="T66">完成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57"/></text:span><text:span text:style-name="T67">O(log n)</text:span></text:p>
          </table:table-cell>
        </table:table-row>
      </table:table>
      <text:p text:style-name="P3"/>
      <text:h text:style-name="P20" text:outline-level="1" loext:marker-style-name="T110"><text:span text:style-name="T111">七、</text:span><text:span text:style-name="T110">Interval Heap</text:span><text:span text:style-name="T111">（區間堆積）【</text:span><text:span text:style-name="T110">110</text:span><text:span text:style-name="T111">地</text:span><text:span text:style-name="T110">Q4</text:span><text:span text:style-name="T111">】</text:span></text:h>
      <text:h text:style-name="P21" text:outline-level="2" loext:marker-style-name="T112"><text:span text:style-name="T112">7-1 <text:s/></text:span><text:span text:style-name="T113">問題起源：</text:span><text:span text:style-name="T114">普通 </text:span><text:span text:style-name="T115">Heap</text:span><text:span text:style-name="T112"> </text:span><text:span text:style-name="T116">只能快速取一端</text:span></text:h>
      <text:p text:style-name="P22" loext:marker-style-name="T117"><text:span text:style-name="T118">回顧你已學過的 </text:span><text:span text:style-name="T117">Max Heap</text:span><text:span text:style-name="T118">：</text:span></text:p>
      <text:p text:style-name="P23" loext:marker-style-name="T119"><text:span text:style-name="T119"><text:s text:c="11"/>100 <text:s text:c="6"/>← </text:span><text:span text:style-name="T120">Root</text:span><text:span text:style-name="T119"> = 全域最大值（</text:span><text:span text:style-name="T120">O(1) 取得</text:span><text:span text:style-name="T119">）</text:span></text:p>
      <text:p text:style-name="P24"><text:soft-page-break/><text:span text:style-name="T119"><text:s text:c="10"/>/ <text:s text:c="3"/>\</text:span></text:p>
      <text:p text:style-name="P24" loext:marker-style-name="T119"><text:span text:style-name="T119"><text:s text:c="8"/>90 <text:s text:c="5"/>80</text:span><text:span text:style-name="T119"/></text:p>
      <text:p text:style-name="P24" loext:marker-style-name="T119"><text:span text:style-name="T119"><text:s text:c="7"/>/ <text:s/>\</text:span><text:span text:style-name="T119"/></text:p>
      <text:p text:style-name="P24" loext:marker-style-name="T119"><text:span text:style-name="T119"><text:s text:c="6"/>70 <text:s text:c="2"/>60</text:span><text:span text:style-name="T119"/></text:p>
      <text:p text:style-name="P24"/>
      <text:p text:style-name="P24" loext:marker-style-name="T119"><text:span text:style-name="T119"><text:s text:c="2"/>Find-Max <text:s/>= O(1) <text:s/>直接</text:span><text:span text:style-name="T120">看 Root</text:span></text:p>
      <text:p text:style-name="P25" loext:marker-style-name="T119"><text:span text:style-name="T119"><text:s text:c="2"/></text:span><text:span text:style-name="T121">Find-Min <text:s/>= O(n)</text:span><text:span text:style-name="T119"> <text:s/></text:span><text:span text:style-name="T122">最小值藏在某個葉節點，不知在哪，</text:span><text:span text:style-name="T123">只能全掃</text:span></text:p>
      <text:p text:style-name="P26"/>
      <text:p text:style-name="P22" loext:marker-style-name="T117"><text:span text:style-name="T117">Max Heap </text:span><text:span text:style-name="T118">有一個致命弱點：</text:span></text:p>
      <text:list text:style-name="WWNum14">
        <text:list-item>
          <text:p text:style-name="P27" loext:marker-style-name="T117"><text:span text:style-name="T118">取最大值 → </text:span><text:span text:style-name="T117">O(1)</text:span><text:span text:style-name="T118">，非常快，因為 </text:span><text:span text:style-name="T117">Root </text:span><text:span text:style-name="T118">就是最大值。</text:span></text:p>
        </text:list-item>
        <text:list-item>
          <text:p text:style-name="P27" loext:marker-style-name="T117"><text:span text:style-name="T124">取最小值 → </text:span><text:span text:style-name="T125">O(n)</text:span><text:span text:style-name="T118">，</text:span><text:span text:style-name="T126">非常慢，因為最小值可能藏在任何一個葉節點，沒有規律可循。</text:span></text:p>
        </text:list-item>
      </text:list>
      <text:p text:style-name="P26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26" loext:marker-style-name="T127"><text:span text:style-name="T127">❓ </text:span><text:span text:style-name="T128">想一想：最小值在哪裡？</text:span></text:p>
            <text:p text:style-name="P26" loext:marker-style-name="T129"><text:span text:style-name="T130">以上面的 </text:span><text:span text:style-name="T129">Max Heap </text:span><text:span text:style-name="T130">為例，最小值 </text:span><text:span text:style-name="T129">60 </text:span><text:span text:style-name="T130">藏在葉節點。</text:span></text:p>
            <text:p text:style-name="P28" loext:marker-style-name="T129"><text:span text:style-name="T130">如果樹有 </text:span><text:span text:style-name="T129">n </text:span><text:span text:style-name="T130">個節點，不掃到最後一層根本不知道最小值在哪。</text:span></text:p>
          </table:table-cell>
        </table:table-row>
      </table:table>
      <text:p text:style-name="P29"/>
      <text:h text:style-name="P21" text:outline-level="2" loext:marker-style-name="T112"><text:span text:style-name="T112">7-2 <text:s/></text:span><text:span text:style-name="T114">現實需求</text:span><text:span text:style-name="T113">：</text:span><text:span text:style-name="T116">兩端都要快</text:span></text:h>
      <text:p text:style-name="P22" loext:marker-style-name="T117"><text:span text:style-name="T118">在</text:span><text:span text:style-name="T131">很多實際應用中</text:span><text:span text:style-name="T118">，我們</text:span><text:span text:style-name="T132">同時需要快速取出最大值和最小值</text:span><text:span text:style-name="T118">：</text:span></text:p>
      <text:p text:style-name="P26"/>
      <text:p text:style-name="P23" loext:marker-style-name="T119"><text:span text:style-name="T119"><text:s text:c="2"/>📈 股票交易系統：</text:span><text:span text:style-name="T119"/></text:p>
      <text:p text:style-name="P24" loext:marker-style-name="T119"><text:span text:style-name="T119"><text:s text:c="7"/>→ 最高價（最大值）O(1) 快速取得</text:span><text:span text:style-name="T119"/></text:p>
      <text:p text:style-name="P24" loext:marker-style-name="T119"><text:span text:style-name="T119"><text:s text:c="7"/>→ 最低價（最小值）O(1) 快速取得</text:span><text:span text:style-name="T119"/></text:p>
      <text:p text:style-name="P24"/>
      <text:p text:style-name="P24" loext:marker-style-name="T119"><text:span text:style-name="T119"><text:s text:c="2"/>🖥️ <text:s/>CPU 排程器（雙優先權模式）：</text:span><text:span text:style-name="T119"/></text:p>
      <text:p text:style-name="P24" loext:marker-style-name="T119"><text:span text:style-name="T119"><text:s text:c="7"/>→ 最高優先權工作 <text:s/>→ 優先執行</text:span><text:span text:style-name="T119"/></text:p>
      <text:p text:style-name="P24" loext:marker-style-name="T119"><text:span text:style-name="T119"><text:s text:c="7"/>→ 最低優先權工作 <text:s/>→ 必要時踢出讓位</text:span><text:span text:style-name="T119"/></text:p>
      <text:p text:style-name="P24"/>
      <text:p text:style-name="P24" loext:marker-style-name="T119"><text:span text:style-name="T119"><text:s text:c="2"/>❌ </text:span><text:span text:style-name="T120">普通 Max Heap</text:span><text:span text:style-name="T119"> 做不到：</text:span><text:span text:style-name="T133">找最小值要</text:span><text:span text:style-name="T123"> O(n)</text:span></text:p>
      <text:p text:style-name="P25" loext:marker-style-name="T119"><text:span text:style-name="T119"><text:s text:c="2"/>❌ </text:span><text:span text:style-name="T120">普通 Min Heap</text:span><text:span text:style-name="T119"> 做不到：</text:span><text:span text:style-name="T133">找最大值要</text:span><text:span text:style-name="T123"> O(n)</text:span></text:p>
      <text:p text:style-name="P26"/>
      <text:p text:style-name="P22" loext:marker-style-name="T117"><text:span text:style-name="T118">這類需求稱為 </text:span><text:span text:style-name="T117">Double-Ended Priority Queue</text:span><text:span text:style-name="T118">（</text:span><text:span text:style-name="T117">DEPQ</text:span><text:span text:style-name="T118">，</text:span><text:span text:style-name="T134">雙端優先佇列</text:span><text:span text:style-name="T118">），</text:span><text:span text:style-name="T126">目標是</text:span><text:span text:style-name="T118">：</text:span>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26" loext:marker-style-name="T127"><text:span text:style-name="T127">Extract-Min</text:span><text:span text:style-name="T128">（</text:span><text:span text:style-name="T135">取出最小值</text:span><text:span text:style-name="T128">）</text:span><text:span text:style-name="T127">= </text:span><text:span text:style-name="T136">O(log n)</text:span></text:p>
            <text:p text:style-name="P28" loext:marker-style-name="T127"><text:span text:style-name="T127">Extract-Max</text:span><text:span text:style-name="T128">（</text:span><text:span text:style-name="T135">取出最大值</text:span><text:span text:style-name="T128">）</text:span><text:span text:style-name="T127">= </text:span><text:span text:style-name="T136">O(log n)</text:span></text:p>
          </table:table-cell>
        </table:table-row>
      </table:table>
      <text:p text:style-name="P29"/>
      <text:h text:style-name="P21" text:outline-level="2" loext:marker-style-name="T112"><text:span text:style-name="T112">7-3 <text:s/>Interval Heap </text:span><text:span text:style-name="T113">的核心設計</text:span></text:h>
      <text:p text:style-name="P22" loext:marker-style-name="T117"><text:span text:style-name="T137">Interval Heap </text:span><text:span text:style-name="T138">的靈感</text:span><text:span text:style-name="T118">：</text:span><text:span text:style-name="T126">把 </text:span><text:span text:style-name="T139">Min Heap </text:span><text:span text:style-name="T126">和 </text:span><text:span text:style-name="T139">Max Heap</text:span><text:span text:style-name="T140">「疊」在同一棵樹上</text:span><text:span text:style-name="T118">。</text:span></text:p>
      <text:p text:style-name="P22" loext:marker-style-name="T117"><text:span text:style-name="T141">具體做法：</text:span><text:span text:style-name="T142">每個節點不再存一個值</text:span><text:span text:style-name="T118">，</text:span><text:span text:style-name="T132">改成存一個「區間」</text:span><text:span text:style-name="T143">[min_val, max_val]</text:span><text:span text:style-name="T118">：</text:span></text:p>
      <text:p text:style-name="P23" loext:marker-style-name="T119"><text:span text:style-name="T119"><text:s text:c="2"/></text:span><text:span text:style-name="T144">普通</text:span><text:span text:style-name="T119"> Heap 節點： <text:s text:c="9"/>Interval Heap 節點：</text:span></text:p>
      <text:p text:style-name="P24" loext:marker-style-name="T119"><text:span text:style-name="T119"><text:s text:c="7"/></text:span><text:span text:style-name="T120">80</text:span><text:span text:style-name="T119"> <text:s text:c="23"/></text:span><text:span text:style-name="T120">[20, 80]</text:span></text:p>
      <text:p text:style-name="P30"><text:s text:c="34"/>左值 <text:s/>右值</text:p>
      <text:p text:style-name="P24" loext:marker-style-name="T119"><text:soft-page-break/><text:span text:style-name="T119"><text:s text:c="30"/>（小的） <text:s/>（大的）</text:span><text:span text:style-name="T119"/></text:p>
      <text:p text:style-name="P24"/>
      <text:p text:style-name="P25" loext:marker-style-name="T119"><text:span text:style-name="T119"><text:s text:c="2"/>規則：</text:span><text:span text:style-name="T145">每個節點的 左值 ≤ 右值</text:span><text:span text:style-name="T146"> </text:span><text:span text:style-name="T119">（必須成立）</text:span></text:p>
      <text:p text:style-name="P26"/>
      <text:p text:style-name="P22" loext:marker-style-name="T117"><text:span text:style-name="T147">兩個 </text:span><text:span text:style-name="T148">Heap </text:span><text:span text:style-name="T147">的同時維護</text:span><text:span text:style-name="T118">：</text:span></text:p>
      <text:list text:continue-numbering="true" text:style-name="WWNum14">
        <text:list-item>
          <text:p text:style-name="P27" loext:marker-style-name="T117"><text:span text:style-name="T131">所有節點的</text:span><text:span text:style-name="T149">左</text:span><text:span text:style-name="T131">值（</text:span><text:span text:style-name="T150">min </text:span><text:span text:style-name="T131">端）</text:span><text:span text:style-name="T118">— 自上而下形成一個 </text:span><text:span text:style-name="T151">Min Heap</text:span></text:p>
        </text:list-item>
        <text:list-item>
          <text:p text:style-name="P27" loext:marker-style-name="T117"><text:span text:style-name="T131">所有節點的</text:span><text:span text:style-name="T152">右</text:span><text:span text:style-name="T131">值（</text:span><text:span text:style-name="T150">max </text:span><text:span text:style-name="T131">端</text:span><text:span text:style-name="T118">）— 自上而下形成一個 </text:span><text:span text:style-name="T153">Max Heap</text:span></text:p>
        </text:list-item>
      </text:list>
      <text:p text:style-name="P26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26" loext:marker-style-name="T127"><text:span text:style-name="T127">Interval Heap = </text:span><text:span text:style-name="T154">Min Heap</text:span><text:span text:style-name="T155">（左值）</text:span><text:span text:style-name="T127">+</text:span><text:span text:style-name="T153"> Max Heap</text:span><text:span text:style-name="T156">（右值）</text:span><text:span text:style-name="T157">同時疊在一棵樹上</text:span></text:p>
          </table:table-cell>
        </table:table-row>
      </table:table>
      <text:p text:style-name="P29"/>
      <text:h text:style-name="P21" text:outline-level="2" loext:marker-style-name="T112"><text:span text:style-name="T112">7-4 <text:s/></text:span><text:span text:style-name="T113">整棵樹的結構解析</text:span></text:h>
      <text:p text:style-name="P23" loext:marker-style-name="T119"><text:span text:style-name="T119"><text:s text:c="14"/>[</text:span><text:span text:style-name="T144">10</text:span><text:span text:style-name="T119">, </text:span><text:span text:style-name="T158">100</text:span><text:span text:style-name="T119">] <text:s text:c="9"/>← Root</text:span></text:p>
      <text:p text:style-name="P24" loext:marker-style-name="T119"><text:span text:style-name="T119"><text:s text:c="13"/>/ <text:s text:c="9"/>\</text:span><text:span text:style-name="T119"/></text:p>
      <text:p text:style-name="P25" loext:marker-style-name="T119"><text:span text:style-name="T119"><text:s text:c="8"/>[</text:span><text:span text:style-name="T144">20</text:span><text:span text:style-name="T119">, </text:span><text:span text:style-name="T158">80</text:span><text:span text:style-name="T119">] <text:s text:c="5"/>[</text:span><text:span text:style-name="T144">30</text:span><text:span text:style-name="T119">, </text:span><text:span text:style-name="T158">90</text:span><text:span text:style-name="T119">]</text:span></text:p>
      <text:p text:style-name="P26"/>
      <text:p text:style-name="P22" loext:marker-style-name="T117"><text:span text:style-name="T118">拆開來看左右兩個 </text:span><text:span text:style-name="T117">Heap</text:span><text:span text:style-name="T118">：</text:span></text:p>
      <text:p text:style-name="P23" loext:marker-style-name="T119"><text:span text:style-name="T119"><text:s text:c="2"/></text:span><text:span text:style-name="T159">左值（min 端）形成 Min Heap</text:span><text:span text:style-name="T119">： <text:s text:c="2"/></text:span><text:span text:style-name="T160">右值（max 端）形成 Max Heap</text:span><text:span text:style-name="T119">：</text:span></text:p>
      <text:p text:style-name="P24"/>
      <text:p text:style-name="P24" loext:marker-style-name="T119"><text:span text:style-name="T119"><text:s text:c="10"/>10 <text:s text:c="30"/>100</text:span><text:span text:style-name="T119"/></text:p>
      <text:p text:style-name="P24" loext:marker-style-name="T119"><text:span text:style-name="T119"><text:s text:c="9"/>/ <text:s/>\ <text:s text:c="28"/>/ <text:s text:c="3"/>\</text:span><text:span text:style-name="T119"/></text:p>
      <text:p text:style-name="P24" loext:marker-style-name="T119"><text:span text:style-name="T119"><text:s text:c="8"/>20 <text:s/>30 <text:s text:c="26"/>80 <text:s text:c="4"/>90</text:span><text:span text:style-name="T119"/></text:p>
      <text:p text:style-name="P24"/>
      <text:p text:style-name="P25" loext:marker-style-name="T119"><text:span text:style-name="T119"><text:s text:c="2"/>驗證 Min Heap：10 ≤ 20 ✓ <text:s/>10 ≤ 30 ✓ <text:s text:c="2"/>驗證 Max Heap：100 ≥ 80 ✓ <text:s/>100 ≥ 90 ✓</text:span><text:span text:style-name="T119"/></text:p>
      <text:p text:style-name="P26"/>
      <text:p text:style-name="P22" loext:marker-style-name="T117"><text:span text:style-name="T118">因此：</text:span><text:span text:style-name="T117"/></text:p>
      <text:list text:continue-numbering="true" text:style-name="WWNum14">
        <text:list-item>
          <text:p text:style-name="P27" loext:marker-style-name="T117"><text:span text:style-name="T150">Root </text:span><text:span text:style-name="T131">的</text:span><text:span text:style-name="T149">左</text:span><text:span text:style-name="T131">值</text:span><text:span text:style-name="T118"> </text:span><text:span text:style-name="T117">= </text:span><text:span text:style-name="T161">Min</text:span><text:span text:style-name="T117"> Heap </text:span><text:span text:style-name="T118">的 </text:span><text:span text:style-name="T117">Root = </text:span><text:span text:style-name="T162">全域最小值</text:span><text:span text:style-name="T118"> </text:span><text:span text:style-name="T117">= 10 <text:s/>→ <text:s/>Find-Min = O(1)</text:span></text:p>
        </text:list-item>
        <text:list-item>
          <text:p text:style-name="P27" loext:marker-style-name="T117"><text:span text:style-name="T150">Root </text:span><text:span text:style-name="T131">的</text:span><text:span text:style-name="T152">右</text:span><text:span text:style-name="T131">值</text:span><text:span text:style-name="T118"> </text:span><text:span text:style-name="T117">= </text:span><text:span text:style-name="T163">Max</text:span><text:span text:style-name="T117"> Heap </text:span><text:span text:style-name="T118">的 </text:span><text:span text:style-name="T117">Root = </text:span><text:span text:style-name="T164">全域最大值</text:span><text:span text:style-name="T118"> </text:span><text:span text:style-name="T117">= 100 <text:s/>→ <text:s/>Find-Max = O(1)</text:span></text:p>
        </text:list-item>
      </text:list>
      <text:p text:style-name="P26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26" loext:marker-style-name="T127"><text:span text:style-name="T127">🎯 Interval Heap </text:span><text:span text:style-name="T128">的核心價值</text:span></text:p>
            <text:p text:style-name="P26" loext:marker-style-name="T129"><text:span text:style-name="T165">Root </text:span><text:span text:style-name="T166">節點</text:span><text:span text:style-name="T135">同時持有全域最小值（左值）和全域最大值（右值）</text:span><text:span text:style-name="T130">，</text:span></text:p>
            <text:p text:style-name="P28" loext:marker-style-name="T129"><text:span text:style-name="T167">無論取哪一端</text:span><text:span text:style-name="T130">，</text:span><text:span text:style-name="T126">都能 </text:span><text:span text:style-name="T139">O(1) </text:span><text:span text:style-name="T126">找到、</text:span><text:span text:style-name="T139">O(log n) </text:span><text:span text:style-name="T126">取出。</text:span></text:p>
          </table:table-cell>
        </table:table-row>
      </table:table>
      <text:p text:style-name="P29"/>
      <text:h text:style-name="P31" text:outline-level="2" loext:marker-style-name="T13"><text:span text:style-name="T14">7-4.5 <text:s/></text:span><text:span text:style-name="T168">Find 找到 vs. Extract 取出</text:span><text:span text:style-name="T14">：</text:span><text:span text:style-name="T169">為何一個 O(1)、一個 O(log n)</text:span><text:span text:style-name="T14">？</text:span></text:h>
      <text:p text:style-name="P5" loext:marker-style-name="T170"><text:span text:style-name="T171">這是很多人第一次接觸 Heap 時最容易混淆的地方。關鍵在於：</text:span><text:span text:style-name="T172">「找到（Find/Peek）」和「取出（Extract/Delete）」是完全不同的兩件事。</text:span></text:p>
      <text:p text:style-name="P29"/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9" loext:marker-style-name="T27"><text:span text:style-name="T173">先用普通 Max Heap 建立直覺</text:span><text:span text:style-name="T27"/></text:p>
          </table:table-cell>
        </table:table-row>
        <text:soft-page-break/>
        <table:table-row table:style-name="表格30.1">
          <table:table-cell table:style-name="表格30.A1" office:value-type="string">
            <text:p text:style-name="P9"/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11"/>100 <text:s text:c="2"/>← Root = 全域最大值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10"/>/ <text:s text:c="2"/>\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8"/>90 <text:s text:c="3"/>80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5"/>70 <text:s/>60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/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Find-Max（找最大值）= O(1)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2"/>→ 直接讀 Root，什麼都不用動。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/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Extract-Max（取出最大值）= O(log n)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2"/>→ </text:span><text:span text:style-name="T174">要真正把 100 從樹裡刪掉，並維持兩個條件：</text:span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4"/>1. </text:span><text:span text:style-name="T175">Complete Binary Tree 結構不能破壞</text:span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4"/>2. </text:span><text:span text:style-name="T176">Heap Property（父 ≥ 子）不能違反</text:span></text:p>
          </table:table-cell>
        </table:table-row>
      </table:table>
      <text:p text:style-name="P29"/>
      <text:p text:style-name="P5" loext:marker-style-name="T170"><text:span text:style-name="T177">「取出」的代價遠比「找到」高，是因為</text:span><text:span text:style-name="T178">刪除 Root 後必須完整修復整棵樹的結構。</text:span><text:span text:style-name="T171">流程如下：</text:span></text:p>
      <text:p text:style-name="P29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9" loext:marker-style-name="T22"><text:span text:style-name="T23">Extract-Max 完整流程（以上面的 Max Heap 為例）：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Step 1：取出 Root = 10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Step 2：把最後元素（葉節點最右端）60 搬到 Root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9"/>60 <text:s text:c="2"/>← 60 補位後，Heap Property 壞掉了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7"/>90 <text:s/>8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6"/>/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5"/>7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Step 3：60 &lt; 90，違反 Max Heap → 與較大子節點 90 交換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ext:soft-page-break/>
        <table:table-row table:style-name="表格31.1">
          <table:table-cell table:style-name="表格31.A1" office:value-type="string">
            <text:p text:style-name="P9" loext:marker-style-name="T22"><text:span text:style-name="T23"><text:s text:c="9"/>9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7"/>60 <text:s/>8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6"/>/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5"/>7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Step 4：60 &lt; 70，仍違反 → 再往下交換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9"/>9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7"/>70 <text:s/>8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6"/>/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5"/>60 <text:s text:c="2"/>← 60 最終落到葉節點，停止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這個「一路往下修正」的過程稱為 Heapify Down（向下沉）。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179">最壞情況需走完整棵樹的高度 h = log₂n</text:span><text:span text:style-name="T23">，因此 </text:span><text:span text:style-name="T180">O(log n)</text:span><text:span text:style-name="T23">。</text:span></text:p>
          </table:table-cell>
        </table:table-row>
      </table:table>
      <text:p text:style-name="P29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9" loext:marker-style-name="T27"><text:span text:style-name="T173">直覺比喻：</text:span><text:span text:style-name="T27"/></text:p>
          </table:table-cell>
        </table:table-row>
        <table:table-row table:style-name="表格32.1">
          <table:table-cell table:style-name="表格32.A1" office:value-type="string">
            <text:p text:style-name="P9"/>
          </table:table-cell>
        </table:table-row>
        <table:table-row table:style-name="表格32.1">
          <table:table-cell table:style-name="表格32.A1" office:value-type="string">
            <text:p text:style-name="P9" loext:marker-style-name="T22"><text:span text:style-name="T23"><text:s text:c="2"/>Find <text:s text:c="2"/>= 看書架最上面那本書 → O(1)，就在眼前，看一眼即可。</text:span><text:span text:style-name="T22"/></text:p>
          </table:table-cell>
        </table:table-row>
        <table:table-row table:style-name="表格32.1">
          <table:table-cell table:style-name="表格32.A1" office:value-type="string">
            <text:p text:style-name="P9" loext:marker-style-name="T22"><text:span text:style-name="T23"><text:s text:c="2"/></text:span><text:span text:style-name="T181">Extract</text:span><text:span text:style-name="T23"> = </text:span><text:span text:style-name="T182">把那本書抽出來 → O(log n)</text:span></text:p>
          </table:table-cell>
        </table:table-row>
        <table:table-row table:style-name="表格32.1">
          <table:table-cell table:style-name="表格32.A1" office:value-type="string">
            <text:p text:style-name="P9" loext:marker-style-name="T22"><text:span text:style-name="T23"><text:s text:c="11"/></text:span><text:span text:style-name="T174"><text:s/>抽走後，下面的書要重新整理排好，</text:span></text:p>
          </table:table-cell>
        </table:table-row>
        <table:table-row table:style-name="表格32.1">
          <table:table-cell table:style-name="表格32.A1" office:value-type="string">
            <text:p text:style-name="P9" loext:marker-style-name="T22"><text:span text:style-name="T23"><text:s text:c="12"/></text:span><text:span text:style-name="T183">這個「整理」的工作量才是 O(log n) 的真正來源。</text:span></text:p>
          </table:table-cell>
        </table:table-row>
      </table:table>
      <text:p text:style-name="P29"/>
      <text:h text:style-name="P31" text:outline-level="2" loext:marker-style-name="T13"><text:span text:style-name="T14">7-4.6 <text:s/>Interval Heap 的 Extract-Min 與 Extract-Max 完整示範</text:span><text:span text:style-name="T13"/></text:h>
      <text:p text:style-name="P5" loext:marker-style-name="T170"><text:span text:style-name="T171">Interval Heap 的 Extract 操作，本質上就是普通 Heap 的 Heapify Down，只是同時維護 Min 端和 Max 端兩條性質。以下用同一棵初始樹，分別展示兩種操作。</text:span><text:span text:style-name="T170"/></text:p>
      <text:p text:style-name="P29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9" loext:marker-style-name="T27"><text:span text:style-name="T173">初始 Interval Heap：</text:span><text:span text:style-name="T27"/></text:p>
          </table:table-cell>
        </table:table-row>
        <table:table-row table:style-name="表格33.1">
          <table:table-cell table:style-name="表格33.A1" office:value-type="string">
            <text:p text:style-name="P9"/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<text:s text:c="13"/>[10, 100] <text:s text:c="6"/>← Root</text:span><text:span text:style-name="T22"/></text:p>
          </table:table-cell>
        </table:table-row>
        <text:soft-page-break/>
        <table:table-row table:style-name="表格33.1">
          <table:table-cell table:style-name="表格33.A1" office:value-type="string">
            <text:p text:style-name="P9" loext:marker-style-name="T22"><text:span text:style-name="T23"><text:s text:c="12"/>/ <text:s text:c="9"/>\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<text:s text:c="7"/>[20, 80] <text:s text:c="5"/>[30, 90]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/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左值（min 端）形成 Min Heap： <text:s/>10 ≤ 20，10 ≤ 30 ✓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右值（max 端）形成 Max Heap： <text:s/>100 ≥ 80，100 ≥ 90 ✓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/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全域最小值 = Root 左值 = 10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全域最大值 = Root 右值 = 100</text:span><text:span text:style-name="T22"/></text:p>
          </table:table-cell>
        </table:table-row>
      </table:table>
      <text:p text:style-name="P29"/>
      <text:h text:style-name="P31" text:outline-level="2" loext:marker-style-name="T13"><text:span text:style-name="T14"><text:s text:c="2"/>一、Extract-Min（</text:span><text:span text:style-name="T184">取出最小值 10</text:span><text:span text:style-name="T14">）</text:span>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9" loext:marker-style-name="T22"><text:span text:style-name="T23">Step 1：</text:span><text:span text:style-name="T185">取出 Root 左值（最小值）= 10</text:span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Root 左側空洞，需要補位。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[ ?, 10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/ <text:s text:c="7"/>\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6"/>[20, 80] <text:s text:c="3"/>[30, 9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Step 2：補位規則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把最後節點（[30, 90]）整體移除，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取其 min 端（30）補到 Root 的左值位置。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（補 min 端修的是 Min Heap；補 max 端修的是 Max Heap）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[30, 10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/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6"/>[20, 8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Step 3：檢查 Min Heap 性質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Root min = 30，Child min = 20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</text:span><text:span text:style-name="T186">30 &gt; 20 → 違反 Min Heap（父 ≤ 子）</text:span><text:span text:style-name="T23">→ </text:span><text:span text:style-name="T187">交換 min 端</text:span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ext:soft-page-break/>
        <table:table-row table:style-name="表格34.1">
          <table:table-cell table:style-name="表格34.A1" office:value-type="string">
            <text:p text:style-name="P9" loext:marker-style-name="T22"><text:span text:style-name="T23">Step 4：Heapify Down（min 端下沉）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[20, 10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/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6"/>[30, 8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20 ≤ 30 → 合法，停止。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最終結果：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[20, 10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/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6"/>[30, 8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成功取出最小值 10，</text:span><text:span text:style-name="T174">Min Heap 與 Max Heap 性質皆完整恢復</text:span><text:span text:style-name="T23">。</text:span></text:p>
          </table:table-cell>
        </table:table-row>
      </table:table>
      <text:p text:style-name="P29"/>
      <text:h text:style-name="P31" text:outline-level="2" loext:marker-style-name="T13"><text:span text:style-name="T14"><text:s text:c="2"/>二、Extract-Max（</text:span><text:span text:style-name="T184">取出最大值 100</text:span><text:span text:style-name="T14">）</text:span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9" loext:marker-style-name="T22"><text:span text:style-name="T23">使用同一棵初始樹：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3"/>[10, 10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2"/>/ <text:s text:c="9"/>\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7"/>[20, 80] <text:s text:c="5"/>[30, 9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Step 1：</text:span><text:span text:style-name="T185">取出 Root 右值（最大值）= 100</text:span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8"/>Root 右側空洞，需要補位。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[10, <text:s/>? 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/ <text:s text:c="7"/>\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6"/>[20, 80] <text:s text:c="3"/>[30, 9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Step 2：補位規則</text:span><text:span text:style-name="T22"/></text:p>
          </table:table-cell>
        </table:table-row>
        <text:soft-page-break/>
        <table:table-row table:style-name="表格35.1">
          <table:table-cell table:style-name="表格35.A1" office:value-type="string">
            <text:p text:style-name="P9" loext:marker-style-name="T22"><text:span text:style-name="T23"><text:s text:c="8"/>把最後節點（[30, 90]）整體移除，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8"/>取其 max 端（90）補到 Root 的右值位置。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[10, 9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/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6"/>[20, 8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Step 3：檢查 Max Heap 性質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8"/>Root max = 90，Child max = 80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8"/>90 ≥ 80 → 符合 Max Heap → 無需交換，停止。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最終結果：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[10, 9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/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6"/>[20, 8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成功取出最大值 100，</text:span><text:span text:style-name="T174">結構完整</text:span><text:span text:style-name="T23">。</text:span></text:p>
          </table:table-cell>
        </table:table-row>
      </table:table>
      <text:p text:style-name="P29"/>
      <text:h text:style-name="P31" text:outline-level="2" loext:marker-style-name="T13"><text:span text:style-name="T14"><text:s text:c="2"/>三、Extract-Max 的下沉範例（需多次 Heapify）</text:span><text:span text:style-name="T13"/></text:h>
      <text:p text:style-name="P5" loext:marker-style-name="T170"><text:span text:style-name="T171">上例的 Max Heap 恰好不需要下沉。以下補充一個「確實需要多次下沉」的案例，更能體現 O(log n) 的代價：</text:span><text:span text:style-name="T170"/></text:p>
      <text:p text:style-name="P29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9" loext:marker-style-name="T22"><text:span text:style-name="T23">初始 Interval Heap（5 個節點）：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4"/>[10, 10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3"/>/ <text:s text:c="9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[20, 95] <text:s text:c="5"/>[30, 9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/ <text:s text:c="6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3"/>[40, 85] <text:s/>[50, 7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Step 1：取出 Root max = 100</text:span><text:span text:style-name="T22"/></text:p>
          </table:table-cell>
        </table:table-row>
        <text:soft-page-break/>
        <table:table-row table:style-name="表格36.1">
          <table:table-cell table:style-name="表格36.A1" office:value-type="string">
            <text:p text:style-name="P9" loext:marker-style-name="T22"><text:span text:style-name="T23">Step 2：最後節點 [50, 70] 移除，取其 max 端 70 補到 Root。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4"/>[10, 7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3"/>/ <text:s text:c="9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[20, 95] <text:s text:c="5"/>[30, 9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/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3"/>[40, 85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Step 3：Root max = 70，子節點 max：左=95，右=90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較大子節點 max = 95 &gt; 70 → 違反 Max Heap → 70 與 95 交換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4"/>[10, 95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3"/>/ <text:s text:c="9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[20, 70] <text:s text:c="5"/>[30, 9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/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3"/>[40, 85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Step 4：[20, 70] 的 max = 70，子節點 max：左=85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85 &gt; 70 → 仍違反 → 70 與 85 交換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4"/>[10, 95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3"/>/ <text:s text:c="9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[20, 85] <text:s text:c="5"/>[30, 9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/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3"/>[40, 7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Step 5：[40, 70] 已是葉節點 → 停止。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最終結果：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4"/>[10, 95]</text:span><text:span text:style-name="T22"/></text:p>
          </table:table-cell>
        </table:table-row>
        <text:soft-page-break/>
        <table:table-row table:style-name="表格36.1">
          <table:table-cell table:style-name="表格36.A1" office:value-type="string">
            <text:p text:style-name="P9" loext:marker-style-name="T22"><text:span text:style-name="T23"><text:s text:c="13"/>/ <text:s text:c="9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[20, 85] <text:s text:c="5"/>[30, 9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/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3"/>[40, 7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全域最大值已更新為 95。</text:span><text:span text:style-name="T22"/></text:p>
          </table:table-cell>
        </table:table-row>
      </table:table>
      <text:p text:style-name="P29"/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9" loext:marker-style-name="T27"><text:span text:style-name="T173">公職考試必記：Find vs. Extract 時間一覽</text:span><text:span text:style-name="T27"/></text:p>
          </table:table-cell>
        </table:table-row>
        <table:table-row table:style-name="表格37.1">
          <table:table-cell table:style-name="表格37.A1" office:value-type="string">
            <text:p text:style-name="P9"/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23"><text:s text:c="2"/>操作 <text:s text:c="14"/>Interval Heap <text:s text:c="3"/>普通 Max Heap <text:s text:c="3"/>普通 Min Heap</text:span><text:span text:style-name="T22"/></text:p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23"><text:s text:c="2"/>Find-Min（找最小） O(1) <text:s/>★ <text:s text:c="9"/>O(n) <text:s text:c="12"/>O(1)</text:span><text:span text:style-name="T22"/></text:p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23"><text:s text:c="2"/>Find-Max（找最大） O(1) <text:s/>★ <text:s text:c="9"/>O(1) <text:s text:c="12"/>O(n)</text:span><text:span text:style-name="T22"/></text:p>
          </table:table-cell>
        </table:table-row>
        <table:table-row table:style-name="表格37.1">
          <table:table-cell table:style-name="表格37.A1" office:value-type="string">
            <text:p text:style-name="P32"><text:span text:style-name="T188"><text:s text:c="2"/>Extract-Min <text:s text:c="7"/>O(log n) <text:s text:c="9"/></text:span><text:span text:style-name="T189">O(n) </text:span><text:span text:style-name="T188"><text:s text:c="12"/>O(log n)</text:span></text:p>
          </table:table-cell>
        </table:table-row>
        <table:table-row table:style-name="表格37.1">
          <table:table-cell table:style-name="表格37.A1" office:value-type="string">
            <text:p text:style-name="P32"><text:span text:style-name="T188"><text:s text:c="2"/>Extract-Max <text:s text:c="7"/>O(log n) <text:s text:c="9"/>O(log n) <text:s text:c="8"/></text:span><text:span text:style-name="T190">O(n)</text:span></text:p>
          </table:table-cell>
        </table:table-row>
        <table:table-row table:style-name="表格37.1">
          <table:table-cell table:style-name="表格37.A1" office:value-type="string">
            <text:p text:style-name="P9"/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183">Interval Heap 的兩個 Extract 都是 O(log n)</text:span><text:span text:style-name="T23">，這是其核心優勢：</text:span></text:p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23">Find 快是因為答案就在 Root；</text:span><text:span text:style-name="T22"/></text:p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191">Extract 要 O(log n) </text:span><text:span text:style-name="T23">是因為</text:span><text:span text:style-name="T180">刪除後必須 Heapify Down 修復結構</text:span><text:span text:style-name="T23">。</text:span></text:p>
          </table:table-cell>
        </table:table-row>
      </table:table>
      <text:p text:style-name="P29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9" loext:marker-style-name="T22"><text:span text:style-name="T23">⚠️ <text:s/>常見混淆整理：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/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「Root 節點同時持有全域最小與最大值，所以 O(1) 找到。」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→ 正確。Find = 讀一個值，完全不修改樹，當然 O(1)。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/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「Find 都 O(1) 了，Extract 怎麼還要 O(log n)？」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→ 因為 Extract 是「刪除 + 修復整棵樹」，不只是讀值。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<text:s text:c="2"/>刪除後最後元素補位，再 Heapify Down 重建性質，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<text:s text:c="2"/>最壞走 log n 層 → O(log n)。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/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記法：Find = 看，不動樹 → O(1)。Extract = 拿走，要整理 → O(log n)。</text:span><text:span text:style-name="T22"/></text:p>
          </table:table-cell>
        </table:table-row>
      </table:table>
      <text:p text:style-name="P29"><text:soft-page-break/></text:p>
      <text:p text:style-name="P29"/>
      <text:h text:style-name="P21" text:outline-level="2" loext:marker-style-name="T112"><text:span text:style-name="T112">7-5 <text:s/></text:span><text:span text:style-name="T113">操作複雜度一覽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row table:style-name="表格39.1">
          <table:table-cell table:style-name="表格39.A1" office:value-type="string">
            <text:p text:style-name="Standard" loext:marker-style-name="T192"><text:span text:style-name="T193">操作</text:span><text:span text:style-name="T192"/></text:p>
          </table:table-cell>
          <table:table-cell table:style-name="表格39.A1" office:value-type="string">
            <text:p text:style-name="Standard" loext:marker-style-name="T192"><text:span text:style-name="T192">Interval Heap</text:span><text:span text:style-name="T192"/></text:p>
          </table:table-cell>
          <table:table-cell table:style-name="表格39.A1" office:value-type="string">
            <text:p text:style-name="Standard" loext:marker-style-name="T192"><text:span text:style-name="T193">普通 </text:span><text:span text:style-name="T192">Max Heap</text:span></text:p>
          </table:table-cell>
          <table:table-cell table:style-name="表格39.A1" office:value-type="string">
            <text:p text:style-name="Standard" loext:marker-style-name="T192"><text:span text:style-name="T193">普通 </text:span><text:span text:style-name="T192">Min Heap</text:span></text:p>
          </table:table-cell>
        </table:table-row>
        <table:table-row table:style-name="表格39.1">
          <table:table-cell table:style-name="表格39.A2" office:value-type="string">
            <text:p text:style-name="Standard" loext:marker-style-name="T194"><text:span text:style-name="T194">Find-Min</text:span><text:span text:style-name="T195">（找最小值）</text:span></text:p>
          </table:table-cell>
          <table:table-cell table:style-name="表格39.A2" office:value-type="string">
            <text:p text:style-name="Standard" loext:marker-style-name="T194"><text:span text:style-name="T194">O(1) ★</text:span><text:span text:style-name="T194"/></text:p>
          </table:table-cell>
          <table:table-cell table:style-name="表格39.A2" office:value-type="string">
            <text:p text:style-name="Standard" loext:marker-style-name="T194"><text:span text:style-name="T194">O(n)</text:span><text:span text:style-name="T194"/></text:p>
          </table:table-cell>
          <table:table-cell table:style-name="表格39.A2" office:value-type="string">
            <text:p text:style-name="Standard" loext:marker-style-name="T194"><text:span text:style-name="T194">O(1)</text:span><text:span text:style-name="T194"/></text:p>
          </table:table-cell>
        </table:table-row>
        <table:table-row table:style-name="表格39.1">
          <table:table-cell table:style-name="表格39.A3" office:value-type="string">
            <text:p text:style-name="Standard" loext:marker-style-name="T194"><text:span text:style-name="T194">Find-Max</text:span><text:span text:style-name="T195">（找最大值）</text:span></text:p>
          </table:table-cell>
          <table:table-cell table:style-name="表格39.A3" office:value-type="string">
            <text:p text:style-name="Standard" loext:marker-style-name="T194"><text:span text:style-name="T194">O(1) ★</text:span><text:span text:style-name="T194"/></text:p>
          </table:table-cell>
          <table:table-cell table:style-name="表格39.A3" office:value-type="string">
            <text:p text:style-name="Standard" loext:marker-style-name="T194"><text:span text:style-name="T194">O(1)</text:span><text:span text:style-name="T194"/></text:p>
          </table:table-cell>
          <table:table-cell table:style-name="表格39.A3" office:value-type="string">
            <text:p text:style-name="Standard" loext:marker-style-name="T194"><text:span text:style-name="T194">O(n)</text:span><text:span text:style-name="T194"/></text:p>
          </table:table-cell>
        </table:table-row>
        <table:table-row table:style-name="表格39.1">
          <table:table-cell table:style-name="表格39.A2" office:value-type="string">
            <text:p text:style-name="Standard" loext:marker-style-name="T194"><text:span text:style-name="T194">Extract-Min</text:span><text:span text:style-name="T195">（取出最小）</text:span></text:p>
          </table:table-cell>
          <table:table-cell table:style-name="表格39.A2" office:value-type="string">
            <text:p text:style-name="Standard" loext:marker-style-name="T194"><text:span text:style-name="T194">O(log n) ★</text:span><text:span text:style-name="T194"/></text:p>
          </table:table-cell>
          <table:table-cell table:style-name="表格39.A2" office:value-type="string">
            <text:p text:style-name="Standard" loext:marker-style-name="T194"><text:span text:style-name="T194">O(n)</text:span><text:span text:style-name="T194"/></text:p>
          </table:table-cell>
          <table:table-cell table:style-name="表格39.A2" office:value-type="string">
            <text:p text:style-name="Standard" loext:marker-style-name="T194"><text:span text:style-name="T194">O(log n)</text:span><text:span text:style-name="T194"/></text:p>
          </table:table-cell>
        </table:table-row>
        <table:table-row table:style-name="表格39.1">
          <table:table-cell table:style-name="表格39.A3" office:value-type="string">
            <text:p text:style-name="Standard" loext:marker-style-name="T194"><text:span text:style-name="T194">Extract-Max</text:span><text:span text:style-name="T195">（取出最大）</text:span></text:p>
          </table:table-cell>
          <table:table-cell table:style-name="表格39.A3" office:value-type="string">
            <text:p text:style-name="Standard" loext:marker-style-name="T194"><text:span text:style-name="T194">O(log n) ★</text:span><text:span text:style-name="T194"/></text:p>
          </table:table-cell>
          <table:table-cell table:style-name="表格39.A3" office:value-type="string">
            <text:p text:style-name="Standard" loext:marker-style-name="T194"><text:span text:style-name="T194">O(log n)</text:span><text:span text:style-name="T194"/></text:p>
          </table:table-cell>
          <table:table-cell table:style-name="表格39.A3" office:value-type="string">
            <text:p text:style-name="Standard" loext:marker-style-name="T194"><text:span text:style-name="T194">O(n)</text:span><text:span text:style-name="T194"/></text:p>
          </table:table-cell>
        </table:table-row>
      </table:table>
      <text:p text:style-name="P22"/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26" loext:marker-style-name="T127"><text:span text:style-name="T127">⚠️ <text:s/></text:span><text:span text:style-name="T128">普通 </text:span><text:span text:style-name="T127">Min/Max Heap </text:span><text:span text:style-name="T128">各有盲點：</text:span></text:p>
            <text:p text:style-name="P26" loext:marker-style-name="T129"><text:span text:style-name="T124">普通 </text:span><text:span text:style-name="T125">Max Heap </text:span><text:span text:style-name="T124">找最小值 </text:span><text:span text:style-name="T130">→ </text:span><text:span text:style-name="T150">O(n)</text:span><text:span text:style-name="T131">（要掃整棵樹）</text:span></text:p>
            <text:p text:style-name="P26" loext:marker-style-name="T129"><text:span text:style-name="T196">普通 </text:span><text:span text:style-name="T197">Min Heap </text:span><text:span text:style-name="T196">找最大值 </text:span><text:span text:style-name="T130">→ </text:span><text:span text:style-name="T150">O(n)</text:span><text:span text:style-name="T131">（同理）</text:span></text:p>
            <text:p text:style-name="P28" loext:marker-style-name="T129"><text:span text:style-name="T139">Interval Heap </text:span><text:span text:style-name="T126">解決此問題，兩端操作都達到 </text:span><text:span text:style-name="T139">O(log n)</text:span><text:span text:style-name="T130">，這是其最大優勢。</text:span></text:p>
          </table:table-cell>
        </table:table-row>
      </table:table>
      <text:p text:style-name="P29"/>
      <text:h text:style-name="P21" text:outline-level="2" loext:marker-style-name="T112"><text:span text:style-name="T112">7-6 <text:s/>Insert </text:span><text:span text:style-name="T113">操作示範（插入 </text:span><text:span text:style-name="T112">5</text:span><text:span text:style-name="T113">）</text:span></text:h>
      <text:p text:style-name="P22" loext:marker-style-name="T117"><text:span text:style-name="T118">以下示範將數字 </text:span><text:span text:style-name="T117">5 </text:span><text:span text:style-name="T118">插入含 </text:span><text:span text:style-name="T117">{10, 100}, {20, 80}, {30, 90} </text:span><text:span text:style-name="T118">的 </text:span><text:span text:style-name="T117">Interval Heap</text:span><text:span text:style-name="T118">：</text:span></text:p>
      <text:p text:style-name="P23" loext:marker-style-name="T119"><text:span text:style-name="T119">初始： <text:s text:c="10"/>[10, 100]</text:span><text:span text:style-name="T119"/></text:p>
      <text:p text:style-name="P24" loext:marker-style-name="T119"><text:span text:style-name="T119"><text:s text:c="18"/>/ <text:s text:c="7"/>\</text:span><text:span text:style-name="T119"/></text:p>
      <text:p text:style-name="P24" loext:marker-style-name="T119"><text:span text:style-name="T119"><text:s text:c="13"/>[20, 80] <text:s text:c="2"/>[30, 90]</text:span><text:span text:style-name="T119"/></text:p>
      <text:p text:style-name="P24"/>
      <text:p text:style-name="P24" loext:marker-style-name="T119"><text:span text:style-name="T119">Step 1：新葉 [5, 5] 接在 [20, 80] 左子位置</text:span><text:span text:style-name="T119"/></text:p>
      <text:p text:style-name="P24" loext:marker-style-name="T119"><text:span text:style-name="T119"><text:s text:c="13"/>[10, 100]</text:span><text:span text:style-name="T119"/></text:p>
      <text:p text:style-name="P24" loext:marker-style-name="T119"><text:span text:style-name="T119"><text:s text:c="14"/>/ <text:s text:c="7"/>\</text:span><text:span text:style-name="T119"/></text:p>
      <text:p text:style-name="P24" loext:marker-style-name="T119"><text:span text:style-name="T119"><text:s text:c="9"/>[20, 80] <text:s text:c="2"/>[30, 90]</text:span><text:span text:style-name="T119"/></text:p>
      <text:p text:style-name="P24" loext:marker-style-name="T119"><text:span text:style-name="T119"><text:s text:c="14"/>/</text:span><text:span text:style-name="T119"/></text:p>
      <text:p text:style-name="P24" loext:marker-style-name="T119"><text:span text:style-name="T119"><text:s text:c="11"/>[5, 5] <text:s text:c="2"/>← 5 &lt; parent.min(20)，min 端需上浮</text:span><text:span text:style-name="T119"/></text:p>
      <text:p text:style-name="P24"/>
      <text:p text:style-name="P24" loext:marker-style-name="T119"><text:span text:style-name="T119">Step 2：交換 min 端 → [20,80]→[5,80]，葉→[20,20]</text:span><text:span text:style-name="T119"/></text:p>
      <text:p text:style-name="P24" loext:marker-style-name="T119"><text:span text:style-name="T119"><text:s text:c="13"/>[10, 100]</text:span><text:span text:style-name="T119"/></text:p>
      <text:p text:style-name="P24" loext:marker-style-name="T119"><text:span text:style-name="T119"><text:s text:c="14"/>/ <text:s text:c="7"/>\</text:span><text:span text:style-name="T119"/></text:p>
      <text:p text:style-name="P24" loext:marker-style-name="T119"><text:span text:style-name="T119"><text:s text:c="10"/>[5, 80] <text:s text:c="2"/>[30, 90] <text:s text:c="2"/>← 5 &lt; Root.min(10)，繼續上浮</text:span><text:span text:style-name="T119"/></text:p>
      <text:p text:style-name="P24" loext:marker-style-name="T119"><text:span text:style-name="T119"><text:s text:c="14"/>/</text:span><text:span text:style-name="T119"/></text:p>
      <text:p text:style-name="P24" loext:marker-style-name="T119"><text:span text:style-name="T119"><text:s text:c="10"/>[20, 20]</text:span><text:span text:style-name="T119"/></text:p>
      <text:p text:style-name="P24"/>
      <text:p text:style-name="P24" loext:marker-style-name="T119"><text:span text:style-name="T119">Step 3：交換 min 端 → Root[10,100]→[5,100]，[5,80]→[10,80]</text:span><text:span text:style-name="T119"/></text:p>
      <text:p text:style-name="P24"/>
      <text:p text:style-name="P24" loext:marker-style-name="T119"><text:span text:style-name="T119">最終： <text:s text:c="10"/>[5, 100] <text:s text:c="2"/>← 全域最小值已更新</text:span><text:span text:style-name="T119"/></text:p>
      <text:p text:style-name="P24" loext:marker-style-name="T119"><text:span text:style-name="T119"><text:s text:c="18"/>/ <text:s text:c="7"/>\</text:span><text:span text:style-name="T119"/></text:p>
      <text:p text:style-name="P24" loext:marker-style-name="T119"><text:span text:style-name="T119"><text:s text:c="13"/>[10, 80] <text:s text:c="2"/>[30, 90]</text:span><text:span text:style-name="T119"/></text:p>
      <text:p text:style-name="P24" loext:marker-style-name="T119"><text:span text:style-name="T119"><text:s text:c="18"/>/</text:span><text:span text:style-name="T119"/></text:p>
      <text:p text:style-name="P25" loext:marker-style-name="T119"><text:soft-page-break/><text:span text:style-name="T119"><text:s text:c="13"/>[20, 20]</text:span><text:span text:style-name="T119"/></text:p>
      <text:p text:style-name="P26"/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26" loext:marker-style-name="T127"><text:span text:style-name="T127">Insert </text:span><text:span text:style-name="T128">規則：</text:span></text:p>
            <text:p text:style-name="P26" loext:marker-style-name="T129"><text:span text:style-name="T130">新值 </text:span><text:span text:style-name="T129">&lt; </text:span><text:span text:style-name="T130">父節點左值（</text:span><text:span text:style-name="T129">min</text:span><text:span text:style-name="T130">）→ 交換左值，繼續往上（</text:span><text:span text:style-name="T129">min </text:span><text:span text:style-name="T130">端上浮）</text:span></text:p>
            <text:p text:style-name="P26" loext:marker-style-name="T129"><text:span text:style-name="T130">新值 </text:span><text:span text:style-name="T129">&gt; </text:span><text:span text:style-name="T130">父節點右值（</text:span><text:span text:style-name="T129">max</text:span><text:span text:style-name="T130">）→ 交換右值，繼續往上（</text:span><text:span text:style-name="T129">max </text:span><text:span text:style-name="T130">端上浮）</text:span></text:p>
            <text:p text:style-name="P28" loext:marker-style-name="T129"><text:span text:style-name="T130">新值介於父節點 </text:span><text:span text:style-name="T129">[min, max] </text:span><text:span text:style-name="T130">之間 → 合法，停止</text:span></text:p>
          </table:table-cell>
        </table:table-row>
      </table:table>
      <text:h text:style-name="P20" text:outline-level="1"><text:span text:style-name="T111">八、合併兩個 </text:span><text:span text:style-name="T110">Heap</text:span><text:span text:style-name="T111">（</text:span><text:span text:style-name="T110">Merge Heap</text:span><text:span text:style-name="T111">）【</text:span><text:span text:style-name="T110">111</text:span><text:span text:style-name="T111">地</text:span><text:span text:style-name="T110">Q4</text:span><text:span text:style-name="T111">】</text:span></text:h>
      <text:h text:style-name="P21" text:outline-level="2" loext:marker-style-name="T112"><text:span text:style-name="T112">8-1 <text:s/></text:span><text:span text:style-name="T113">問題起源：普通 </text:span><text:span text:style-name="T112">Heap </text:span><text:span text:style-name="T113">合併需要 </text:span><text:span text:style-name="T112">O(n+m)</text:span></text:h>
      <text:p text:style-name="P22" loext:marker-style-name="T117"><text:span text:style-name="T118">假設現在有兩個 </text:span><text:span text:style-name="T117">Max Heap A </text:span><text:span text:style-name="T118">和 </text:span><text:span text:style-name="T117">B</text:span><text:span text:style-name="T118">，你想把它們合併成一個新的 </text:span><text:span text:style-name="T117">Max Heap</text:span><text:span text:style-name="T118">：</text:span></text:p>
      <text:p text:style-name="P23" loext:marker-style-name="T119"><text:span text:style-name="T119"><text:s text:c="2"/>Heap A： <text:s text:c="9"/>Heap B： <text:s text:c="9"/>合併目標：</text:span><text:span text:style-name="T119"/></text:p>
      <text:p text:style-name="P24" loext:marker-style-name="T119"><text:span text:style-name="T119"><text:s text:c="7"/>90 <text:s text:c="15"/>95 <text:s text:c="16"/>95</text:span><text:span text:style-name="T119"/></text:p>
      <text:p text:style-name="P24" loext:marker-style-name="T119"><text:span text:style-name="T119"><text:s text:c="6"/>/ <text:s/>\ <text:s text:c="13"/>/ <text:s/>\ <text:s text:c="14"/>/ <text:s text:c="3"/>\</text:span><text:span text:style-name="T119"/></text:p>
      <text:p text:style-name="P24" loext:marker-style-name="T119"><text:span text:style-name="T119"><text:s text:c="5"/>70 <text:s text:c="2"/>80 <text:s text:c="10"/>60 <text:s text:c="2"/>50 <text:s text:c="10"/>90 <text:s text:c="5"/>80</text:span><text:span text:style-name="T119"/></text:p>
      <text:p text:style-name="P24" loext:marker-style-name="T119"><text:span text:style-name="T119"><text:s text:c="40"/>/ <text:s/>\ <text:s text:c="2"/>/</text:span><text:span text:style-name="T119"/></text:p>
      <text:p text:style-name="P25" loext:marker-style-name="T119"><text:span text:style-name="T119"><text:s text:c="39"/>70 <text:s/>60 50</text:span><text:span text:style-name="T119"/></text:p>
      <text:p text:style-name="P26"/>
      <text:p text:style-name="P22" loext:marker-style-name="T117"><text:span text:style-name="T118">普通 </text:span><text:span text:style-name="T117">Binary Heap </text:span><text:span text:style-name="T118">沒有高效的合併方法，通常只能：</text:span></text:p>
      <text:list text:continue-numbering="true" text:style-name="WWNum14">
        <text:list-item>
          <text:p text:style-name="P27" loext:marker-style-name="T117"><text:span text:style-name="T118">方法：把 </text:span><text:span text:style-name="T117">A </text:span><text:span text:style-name="T118">和 </text:span><text:span text:style-name="T117">B </text:span><text:span text:style-name="T118">的所有元素倒出來，重新執行 </text:span><text:span text:style-name="T117">Bottom-Up Build Heap</text:span><text:span text:style-name="T118">。</text:span></text:p>
        </text:list-item>
        <text:list-item>
          <text:p text:style-name="P27" loext:marker-style-name="T117"><text:span text:style-name="T118">代價：</text:span><text:span text:style-name="T117">O(n+m)</text:span><text:span text:style-name="T118">，</text:span><text:span text:style-name="T117">n </text:span><text:span text:style-name="T118">和 </text:span><text:span text:style-name="T117">m </text:span><text:span text:style-name="T118">是兩個 </text:span><text:span text:style-name="T117">Heap </text:span><text:span text:style-name="T118">的大小。</text:span></text:p>
        </text:list-item>
      </text:list>
      <text:p text:style-name="P26"/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26" loext:marker-style-name="T127"><text:span text:style-name="T127">❓ O(n+m) </text:span><text:span text:style-name="T128">有什麼問題？</text:span></text:p>
            <text:p text:style-name="P26" loext:marker-style-name="T129"><text:span text:style-name="T130">對單次合併來說 </text:span><text:span text:style-name="T129">O(n+m) </text:span><text:span text:style-name="T130">尚可接受，但有些系統一天要合併幾十萬次：</text:span></text:p>
            <text:p text:style-name="P26" loext:marker-style-name="T129"><text:span text:style-name="T129"><text:s text:c="2"/>• Event-driven Simulation</text:span><text:span text:style-name="T130">（事件驅動模擬）</text:span></text:p>
            <text:p text:style-name="P26" loext:marker-style-name="T129"><text:span text:style-name="T129"><text:s text:c="2"/>• </text:span><text:span text:style-name="T130">作業系統排程器（</text:span><text:span text:style-name="T129">Scheduler</text:span><text:span text:style-name="T130">）</text:span></text:p>
            <text:p text:style-name="P28" loext:marker-style-name="T129"><text:span text:style-name="T129"><text:s text:c="2"/>• </text:span><text:span text:style-name="T130">分散式工作佇列（</text:span><text:span text:style-name="T129">Distributed Job Queue</text:span><text:span text:style-name="T130">）</text:span></text:p>
          </table:table-cell>
        </table:table-row>
      </table:table>
      <text:p text:style-name="P29"/>
      <text:h text:style-name="P21" text:outline-level="2" loext:marker-style-name="T112"><text:span text:style-name="T112">8-2 <text:s/></text:span><text:span text:style-name="T113">解決方案：把右側路徑弄得很短</text:span></text:h>
      <text:p text:style-name="P22" loext:marker-style-name="T117"><text:span text:style-name="T118">發明者的想法很直接：</text:span><text:span text:style-name="T117"/>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26" loext:marker-style-name="T127"><text:span text:style-name="T127">Merge </text:span><text:span text:style-name="T128">只沿右側路徑（</text:span><text:span text:style-name="T127">right path</text:span><text:span text:style-name="T128">）遞迴進行。</text:span></text:p>
            <text:p text:style-name="P26" loext:marker-style-name="T129"><text:span text:style-name="T130">如果右側路徑很短 → </text:span><text:span text:style-name="T129">Merge </text:span><text:span text:style-name="T130">就很快。</text:span></text:p>
            <text:p text:style-name="P28" loext:marker-style-name="T129"><text:span text:style-name="T130">因此：故意把樹弄歪，讓右側路徑保持極短。</text:span><text:span text:style-name="T129"/></text:p>
          </table:table-cell>
        </table:table-row>
      </table:table>
      <text:p text:style-name="P26"/>
      <text:p text:style-name="P23" loext:marker-style-name="T119"><text:span text:style-name="T119"><text:s text:c="2"/>普通 Heap（平衡）： <text:s text:c="11"/>Leftist Heap（故意偏左）：</text:span><text:span text:style-name="T119"/></text:p>
      <text:p text:style-name="P24" loext:marker-style-name="T119"><text:soft-page-break/><text:span text:style-name="T119"><text:s text:c="8"/>90 <text:s text:c="29"/>90</text:span><text:span text:style-name="T119"/></text:p>
      <text:p text:style-name="P24" loext:marker-style-name="T119"><text:span text:style-name="T119"><text:s text:c="7"/>/ <text:s/>\ <text:s text:c="27"/>/</text:span><text:span text:style-name="T119"/></text:p>
      <text:p text:style-name="P24" loext:marker-style-name="T119"><text:span text:style-name="T119"><text:s text:c="6"/>80 <text:s text:c="2"/>70 <text:s text:c="24"/>80</text:span><text:span text:style-name="T119"/></text:p>
      <text:p text:style-name="P24" loext:marker-style-name="T119"><text:span text:style-name="T119"><text:s text:c="5"/>/ \ / \ <text:s text:c="24"/>/</text:span><text:span text:style-name="T119"/></text:p>
      <text:p text:style-name="P24" loext:marker-style-name="T119"><text:span text:style-name="T119"><text:s text:c="4"/>60 50 40 30 <text:s text:c="21"/>70</text:span><text:span text:style-name="T119"/></text:p>
      <text:p text:style-name="P24" loext:marker-style-name="T119"><text:span text:style-name="T119"><text:s text:c="36"/>/</text:span><text:span text:style-name="T119"/></text:p>
      <text:p text:style-name="P24" loext:marker-style-name="T119"><text:span text:style-name="T119"><text:s text:c="35"/>60</text:span><text:span text:style-name="T119"/></text:p>
      <text:p text:style-name="P24"/>
      <text:p text:style-name="P25" loext:marker-style-name="T119"><text:span text:style-name="T119"><text:s text:c="2"/>左右差不多，Merge 要走很深 <text:s text:c="5"/>右側路徑只有 1 步！Merge 超快</text:span><text:span text:style-name="T119"/></text:p>
      <text:p text:style-name="P29"/>
      <text:h text:style-name="P21" text:outline-level="2"><text:span text:style-name="T112">8-3 <text:s/>NPL</text:span><text:span text:style-name="T113">（</text:span><text:span text:style-name="T112">Null Path Length</text:span><text:span text:style-name="T113">，空路徑長度）</text:span></text:h>
      <text:p text:style-name="P22" loext:marker-style-name="T117"><text:span text:style-name="T117">NPL </text:span><text:span text:style-name="T118">是「量化右側有多短」的工具。直觀理解：</text:span></text:p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26" loext:marker-style-name="T127"><text:span text:style-name="T127">NPL(node) = </text:span><text:span text:style-name="T128">從該節點出發，走到最近的空節點（</text:span><text:span text:style-name="T127">null</text:span><text:span text:style-name="T128">）所需的步數</text:span></text:p>
            <text:p text:style-name="P28" loext:marker-style-name="T129"><text:span text:style-name="T129">NPL(null) = -1 <text:s/></text:span><text:span text:style-name="T130">（空節點本身的定義）</text:span></text:p>
          </table:table-cell>
        </table:table-row>
      </table:table>
      <text:p text:style-name="P26"/>
      <text:p text:style-name="P22" loext:marker-style-name="T117"><text:span text:style-name="T118">公式：</text:span><text:span text:style-name="T117">NPL(node) = 1 + min( NPL(</text:span><text:span text:style-name="T118">左子</text:span><text:span text:style-name="T117">), NPL(</text:span><text:span text:style-name="T118">右子</text:span><text:span text:style-name="T117">) )</text:span></text:p>
      <text:p text:style-name="P26"/>
      <text:p text:style-name="P33" loext:marker-style-name="T198"><text:span text:style-name="T198">NPL </text:span><text:span text:style-name="T199">計算範例</text:span></text:p>
      <text:p text:style-name="P23" loext:marker-style-name="T119"><text:span text:style-name="T119"><text:s text:c="14"/>3 <text:s text:c="11"/>← 算 NPL</text:span><text:span text:style-name="T119"/></text:p>
      <text:p text:style-name="P24" loext:marker-style-name="T119"><text:span text:style-name="T119"><text:s text:c="13"/>/ \</text:span><text:span text:style-name="T119"/></text:p>
      <text:p text:style-name="P24" loext:marker-style-name="T119"><text:span text:style-name="T119"><text:s text:c="12"/>5 <text:s text:c="2"/>8</text:span><text:span text:style-name="T119"/></text:p>
      <text:p text:style-name="P24" loext:marker-style-name="T119"><text:span text:style-name="T119"><text:s text:c="11"/>/ \</text:span><text:span text:style-name="T119"/></text:p>
      <text:p text:style-name="P24" loext:marker-style-name="T119"><text:span text:style-name="T119"><text:s text:c="10"/>9 <text:s text:c="2"/>7</text:span><text:span text:style-name="T119"/></text:p>
      <text:p text:style-name="P24"/>
      <text:p text:style-name="P24" loext:marker-style-name="T119"><text:span text:style-name="T119"><text:s text:c="2"/>計算（由葉往根）：</text:span><text:span text:style-name="T119"/></text:p>
      <text:p text:style-name="P24" loext:marker-style-name="T119"><text:span text:style-name="T119"><text:s text:c="4"/>NPL(9) = 1 + min(-1,-1) = 0 <text:s text:c="2"/>（葉節點，兩側皆空）</text:span><text:span text:style-name="T119"/></text:p>
      <text:p text:style-name="P24" loext:marker-style-name="T119"><text:span text:style-name="T119"><text:s text:c="4"/>NPL(7) = 0 <text:s text:c="20"/>（同上）</text:span><text:span text:style-name="T119"/></text:p>
      <text:p text:style-name="P24" loext:marker-style-name="T119"><text:span text:style-name="T119"><text:s text:c="4"/>NPL(8) = 0 <text:s text:c="20"/>（葉節點）</text:span><text:span text:style-name="T119"/></text:p>
      <text:p text:style-name="P24" loext:marker-style-name="T119"><text:span text:style-name="T119"><text:s text:c="4"/>NPL(5) = 1 + min(NPL(9),NPL(7)) = 1+min(0,0) = 1</text:span><text:span text:style-name="T119"/></text:p>
      <text:p text:style-name="P25" loext:marker-style-name="T119"><text:span text:style-name="T119"><text:s text:c="4"/>NPL(3) = 1 + min(NPL(5),NPL(8)) = 1+min(1,0) = 1</text:span><text:span text:style-name="T119"/></text:p>
      <text:p text:style-name="P29"/>
      <text:h text:style-name="P21" text:outline-level="2" loext:marker-style-name="T112"><text:span text:style-name="T112">8-4 <text:s/></text:span><text:span text:style-name="T113">左偏性質（</text:span><text:span text:style-name="T112">Leftist Property</text:span><text:span text:style-name="T113">）</text:span></text:h>
      <text:p text:style-name="P22" loext:marker-style-name="T117"><text:span text:style-name="T117">Leftist Heap </text:span><text:span text:style-name="T118">對每個節點加一條規定：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26" loext:marker-style-name="T127"><text:span text:style-name="T128">每個節點：</text:span><text:span text:style-name="T127">NPL</text:span><text:span text:style-name="T128">（左子樹）≥ </text:span><text:span text:style-name="T127">NPL</text:span><text:span text:style-name="T128">（右子樹）</text:span></text:p>
            <text:p text:style-name="P28" loext:marker-style-name="T129"><text:span text:style-name="T130">意思：左邊一定比右邊「深」或「一樣深」→ 右側路徑一定是最短路徑。</text:span><text:span text:style-name="T129"/></text:p>
          </table:table-cell>
        </table:table-row>
      </table:table>
      <text:p text:style-name="P26"/>
      <text:p text:style-name="P22" loext:marker-style-name="T117"><text:span text:style-name="T118">這個規定保證了：</text:span><text:span text:style-name="T117"/></text:p>
      <text:list text:continue-numbering="true" text:style-name="WWNum14">
        <text:list-item>
          <text:p text:style-name="P27" loext:marker-style-name="T117"><text:span text:style-name="T118">右側路徑長度 ≤ </text:span><text:span text:style-name="T117">log(n+1) <text:s/></text:span><text:span text:style-name="T118">（即使整棵樹有 </text:span><text:span text:style-name="T117">n </text:span><text:span text:style-name="T118">個節點，右路徑也不超過 </text:span><text:span text:style-name="T117">log n </text:span><text:span text:style-name="T118">步）</text:span></text:p>
        </text:list-item>
        <text:list-item>
          <text:p text:style-name="P27" loext:marker-style-name="T117"><text:span text:style-name="T117">Merge </text:span><text:span text:style-name="T118">沿右路徑進行 → 深度 ≤ </text:span><text:span text:style-name="T117">log n → </text:span><text:span text:style-name="T118">時間 </text:span><text:span text:style-name="T117">O(log n)</text:span></text:p>
        </text:list-item>
      </text:list>
      <text:p text:style-name="P26"/>
      <text:p text:style-name="P33" loext:marker-style-name="T198"><text:soft-page-break/><text:span text:style-name="T199">上面範例的左偏驗證</text:span><text:span text:style-name="T198"/></text:p>
      <text:p text:style-name="P23" loext:marker-style-name="T119"><text:span text:style-name="T119"><text:s text:c="2"/>節點 3：NPL(左=5) = 1 <text:s/>≥ <text:s/>NPL(右=8) = 0 <text:s text:c="2"/>✓ 左偏</text:span><text:span text:style-name="T119"/></text:p>
      <text:p text:style-name="P24" loext:marker-style-name="T119"><text:span text:style-name="T119"><text:s text:c="2"/>節點 5：NPL(左=9) = 0 <text:s/>≥ <text:s/>NPL(右=7) = 0 <text:s text:c="2"/>✓ 左偏（相等也算）</text:span><text:span text:style-name="T119"/></text:p>
      <text:p text:style-name="P24"/>
      <text:p text:style-name="P25" loext:marker-style-name="T119"><text:span text:style-name="T119">→ 此樹是合法的 Min Leftist Heap ✓</text:span><text:span text:style-name="T119"/></text:p>
      <text:p text:style-name="P29"/>
      <text:h text:style-name="P21" text:outline-level="2"><text:span text:style-name="T112">8-5 <text:s/>Merge </text:span><text:span text:style-name="T113">演算法（以 </text:span><text:span text:style-name="T112">Min Leftist Heap </text:span><text:span text:style-name="T113">為例）</text:span></text:h>
      <text:p text:style-name="P22" loext:marker-style-name="T117"><text:span text:style-name="T118">只有四個步驟，每次都沿右側路徑遞迴：</text:span><text:span text:style-name="T117"/></text:p>
      <text:p text:style-name="P23" loext:marker-style-name="T119"><text:span text:style-name="T119"><text:s text:c="2"/>Step 1：比較 A 和 B 的 Root</text:span><text:span text:style-name="T119"/></text:p>
      <text:p text:style-name="P24" loext:marker-style-name="T119"><text:span text:style-name="T119"><text:s text:c="11"/>→ 較小的 Root 成為新 Root（Min Heap）</text:span><text:span text:style-name="T119"/></text:p>
      <text:p text:style-name="P24" loext:marker-style-name="T119"><text:span text:style-name="T119"><text:s text:c="11"/>→ 較大的 Root 成為另一個子樹（稱為 b）</text:span><text:span text:style-name="T119"/></text:p>
      <text:p text:style-name="P24"/>
      <text:p text:style-name="P24" loext:marker-style-name="T119"><text:span text:style-name="T119"><text:s text:c="2"/>Step 2：遞迴合併「新 Root 的右子樹」與「b」</text:span><text:span text:style-name="T119"/></text:p>
      <text:p text:style-name="P24" loext:marker-style-name="T119"><text:span text:style-name="T119"><text:s text:c="11"/>→ Merge(newRoot.right, b)</text:span><text:span text:style-name="T119"/></text:p>
      <text:p text:style-name="P24"/>
      <text:p text:style-name="P24" loext:marker-style-name="T119"><text:span text:style-name="T119"><text:s text:c="2"/>Step 3：合併完後，若 NPL(右子樹) &gt; NPL(左子樹)</text:span><text:span text:style-name="T119"/></text:p>
      <text:p text:style-name="P24" loext:marker-style-name="T119"><text:span text:style-name="T119"><text:s text:c="11"/>→ 交換左右子樹，恢復左偏性質</text:span><text:span text:style-name="T119"/></text:p>
      <text:p text:style-name="P24"/>
      <text:p text:style-name="P25" loext:marker-style-name="T119"><text:span text:style-name="T119"><text:s text:c="2"/>Step 4：更新 NPL 值</text:span><text:span text:style-name="T119"/></text:p>
      <text:p text:style-name="P26"/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26" loext:marker-style-name="T127"><text:span text:style-name="T128">為什麼只走右側路徑？</text:span><text:span text:style-name="T127"/></text:p>
            <text:p text:style-name="P26" loext:marker-style-name="T129"><text:span text:style-name="T129">Merge </text:span><text:span text:style-name="T130">每次遞迴都只取「右子樹」→ 路徑深度 </text:span><text:span text:style-name="T129">= </text:span><text:span text:style-name="T130">右側路徑長度 ≤ </text:span><text:span text:style-name="T129">log n</text:span><text:span text:style-name="T130">。</text:span></text:p>
            <text:p text:style-name="P28" loext:marker-style-name="T129"><text:span text:style-name="T130">左側路徑完全不碰，保持不變。</text:span><text:span text:style-name="T129"/></text:p>
          </table:table-cell>
        </table:table-row>
      </table:table>
      <text:p text:style-name="P29"/>
      <text:h text:style-name="P21" text:outline-level="2" loext:marker-style-name="T112"><text:span text:style-name="T112">8-6 <text:s/>Merge </text:span><text:span text:style-name="T113">完整範例</text:span></text:h>
      <text:p text:style-name="P23" loext:marker-style-name="T119"><text:span text:style-name="T119"><text:s text:c="2"/>Heap A（NPL=1）： <text:s text:c="5"/>Heap B（NPL=1）：</text:span><text:span text:style-name="T119"/></text:p>
      <text:p text:style-name="P24" loext:marker-style-name="T119"><text:span text:style-name="T119"><text:s text:c="10"/>3 <text:s text:c="21"/>6</text:span><text:span text:style-name="T119"/></text:p>
      <text:p text:style-name="P24" loext:marker-style-name="T119"><text:span text:style-name="T119"><text:s text:c="9"/>/ \ <text:s text:c="18"/>/ \</text:span><text:span text:style-name="T119"/></text:p>
      <text:p text:style-name="P24" loext:marker-style-name="T119"><text:span text:style-name="T119"><text:s text:c="8"/>5 <text:s text:c="2"/>8 <text:s text:c="15"/>12 <text:s text:c="2"/>7</text:span><text:span text:style-name="T119"/></text:p>
      <text:p text:style-name="P24"/>
      <text:p text:style-name="P24" loext:marker-style-name="T119"><text:span text:style-name="T119"><text:s text:c="2"/>Step 1：3 &lt; 6 → 3 為新 Root，遞迴 Merge(A.right=8, B=6)</text:span><text:span text:style-name="T119"/></text:p>
      <text:p text:style-name="P24"/>
      <text:p text:style-name="P24" loext:marker-style-name="T119"><text:span text:style-name="T119"><text:s text:c="2"/>Step 2：Merge(8, 6)：6 &lt; 8 → 6 為新 Root，遞迴 Merge(B.right=7, 8)</text:span><text:span text:style-name="T119"/></text:p>
      <text:p text:style-name="P24"/>
      <text:p text:style-name="P24" loext:marker-style-name="T119"><text:span text:style-name="T119"><text:s text:c="2"/>Step 3：Merge(7, 8)：7 &lt; 8 → 7 為新 Root</text:span><text:span text:style-name="T119"/></text:p>
      <text:p text:style-name="P24" loext:marker-style-name="T119"><text:span text:style-name="T119"><text:s text:c="11"/>Merge(null, 8) = 8 <text:s/>→ <text:s/>7.right = 8</text:span><text:span text:style-name="T119"/></text:p>
      <text:p text:style-name="P24" loext:marker-style-name="T119"><text:span text:style-name="T119"><text:s text:c="11"/>NPL(7.left=null)=-1 &lt; NPL(7.right=8)=0 <text:s/>→ <text:s/>交換左右！</text:span><text:span text:style-name="T119"/></text:p>
      <text:p text:style-name="P24" loext:marker-style-name="T119"><text:span text:style-name="T119"><text:s text:c="11"/>結果：7.left=8, 7.right=null, NPL(7)=0</text:span><text:span text:style-name="T119"/></text:p>
      <text:p text:style-name="P24" loext:marker-style-name="T119"><text:span text:style-name="T119"><text:s text:c="20"/>7</text:span><text:span text:style-name="T119"/></text:p>
      <text:p text:style-name="P24" loext:marker-style-name="T119"><text:span text:style-name="T119"><text:s text:c="19"/>/</text:span><text:span text:style-name="T119"/></text:p>
      <text:p text:style-name="P24" loext:marker-style-name="T119"><text:span text:style-name="T119"><text:s text:c="18"/>8</text:span><text:span text:style-name="T119"/></text:p>
      <text:p text:style-name="P24"/>
      <text:p text:style-name="P24" loext:marker-style-name="T119"><text:span text:style-name="T119"><text:s text:c="2"/>Step 4：回填 Merge(8,6)：6.left=12, 6.right=7</text:span><text:span text:style-name="T119"/></text:p>
      <text:p text:style-name="P24" loext:marker-style-name="T119"><text:span text:style-name="T119"><text:s text:c="11"/>NPL(12)=0 = NPL(7)=0 <text:s/>→ <text:s/>不需交換</text:span><text:span text:style-name="T119"/></text:p>
      <text:p text:style-name="P24" loext:marker-style-name="T119"><text:span text:style-name="T119"><text:s text:c="11"/>NPL(6) = min(0,0)+1 = 1</text:span><text:span text:style-name="T119"/></text:p>
      <text:p text:style-name="P24" loext:marker-style-name="T119"><text:span text:style-name="T119"><text:s text:c="20"/>6 <text:s/>[NPL=1]</text:span><text:span text:style-name="T119"/></text:p>
      <text:p text:style-name="P24" loext:marker-style-name="T119"><text:span text:style-name="T119"><text:s text:c="19"/>/ \</text:span><text:span text:style-name="T119"/></text:p>
      <text:p text:style-name="P24" loext:marker-style-name="T119"><text:soft-page-break/><text:span text:style-name="T119"><text:s text:c="17"/>12 <text:s text:c="2"/>7</text:span><text:span text:style-name="T119"/></text:p>
      <text:p text:style-name="P24" loext:marker-style-name="T119"><text:span text:style-name="T119"><text:s text:c="21"/>/</text:span><text:span text:style-name="T119"/></text:p>
      <text:p text:style-name="P24" loext:marker-style-name="T119"><text:span text:style-name="T119"><text:s text:c="20"/>8</text:span><text:span text:style-name="T119"/></text:p>
      <text:p text:style-name="P24"/>
      <text:p text:style-name="P24" loext:marker-style-name="T119"><text:span text:style-name="T119"><text:s text:c="2"/>Step 5：回填 Merge(A,B)：3.left=5, 3.right=6</text:span><text:span text:style-name="T119"/></text:p>
      <text:p text:style-name="P24" loext:marker-style-name="T119"><text:span text:style-name="T119"><text:s text:c="11"/>NPL(3.right=6)=1 &gt; NPL(3.left=5)=0 <text:s/>→ <text:s/>交換左右！</text:span><text:span text:style-name="T119"/></text:p>
      <text:p text:style-name="P25" loext:marker-style-name="T119"><text:span text:style-name="T119"><text:s text:c="11"/>NPL(3) = min(NPL(6),NPL(5))+1 = min(1,0)+1 = 1</text:span><text:span text:style-name="T119"/></text:p>
      <text:p text:style-name="P34"/>
      <text:p text:style-name="P35"><text:s text:c="2"/>最終合併結果（Min Leftist Heap）：</text:p>
      <text:p text:style-name="P24"/>
      <text:p text:style-name="P24" loext:marker-style-name="T119"><text:span text:style-name="T119"><text:s text:c="14"/>3 <text:s/>[NPL=1]</text:span><text:span text:style-name="T119"/></text:p>
      <text:p text:style-name="P24" loext:marker-style-name="T119"><text:span text:style-name="T119"><text:s text:c="13"/>/ \</text:span><text:span text:style-name="T119"/></text:p>
      <text:p text:style-name="P24" loext:marker-style-name="T119"><text:span text:style-name="T119"><text:s text:c="12"/>6 <text:s text:c="2"/>5 <text:s/>[NPL=0]</text:span><text:span text:style-name="T119"/></text:p>
      <text:p text:style-name="P24" loext:marker-style-name="T119"><text:span text:style-name="T119"><text:s text:c="11"/>/ \</text:span><text:span text:style-name="T119"/></text:p>
      <text:p text:style-name="P24" loext:marker-style-name="T119"><text:span text:style-name="T119"><text:s text:c="9"/>12 <text:s text:c="2"/>7 <text:s/>[NPL=0]</text:span><text:span text:style-name="T119"/></text:p>
      <text:p text:style-name="P24" loext:marker-style-name="T119"><text:span text:style-name="T119"><text:s text:c="13"/>/</text:span><text:span text:style-name="T119"/></text:p>
      <text:p text:style-name="P24" loext:marker-style-name="T119"><text:span text:style-name="T119"><text:s text:c="12"/>8</text:span><text:span text:style-name="T119"/></text:p>
      <text:p text:style-name="P24"/>
      <text:p text:style-name="P24" loext:marker-style-name="T119"><text:span text:style-name="T119"><text:s text:c="2"/>驗證 Min Heap：3&lt;6 ✓ <text:s/>3&lt;5 ✓ <text:s/>6&lt;12 ✓ <text:s/>6&lt;7 ✓ <text:s/>7&lt;8 ✓</text:span><text:span text:style-name="T119"/></text:p>
      <text:p text:style-name="P25" loext:marker-style-name="T119"><text:span text:style-name="T119"><text:s text:c="2"/>驗證左偏性：NPL(6)=1 ≥ NPL(5)=0 ✓ <text:s/>NPL(12)=0 ≥ NPL(7)=0 ✓</text:span><text:span text:style-name="T119"/></text:p>
      <text:p text:style-name="P29"/>
      <text:h text:style-name="P21" text:outline-level="2" loext:marker-style-name="T112"><text:span text:style-name="T112">8-7 <text:s/></text:span><text:span text:style-name="T113">時間複雜度與重點整理</text:span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row table:style-name="表格47.1">
          <table:table-cell table:style-name="表格47.A1" office:value-type="string">
            <text:p text:style-name="Standard" loext:marker-style-name="T192"><text:span text:style-name="T193">操作</text:span><text:span text:style-name="T192"/></text:p>
          </table:table-cell>
          <table:table-cell table:style-name="表格47.A1" office:value-type="string">
            <text:p text:style-name="Standard" loext:marker-style-name="T192"><text:span text:style-name="T193">普通 </text:span><text:span text:style-name="T192">Binary Heap</text:span></text:p>
          </table:table-cell>
          <table:table-cell table:style-name="表格47.A1" office:value-type="string">
            <text:p text:style-name="Standard" loext:marker-style-name="T192"><text:span text:style-name="T192">Leftist Heap</text:span><text:span text:style-name="T192"/></text:p>
          </table:table-cell>
        </table:table-row>
        <table:table-row table:style-name="表格47.1">
          <table:table-cell table:style-name="表格47.A2" office:value-type="string">
            <text:p text:style-name="Standard" loext:marker-style-name="T194"><text:span text:style-name="T194">Insert</text:span><text:span text:style-name="T194"/></text:p>
          </table:table-cell>
          <table:table-cell table:style-name="表格47.A2" office:value-type="string">
            <text:p text:style-name="Standard" loext:marker-style-name="T194"><text:span text:style-name="T194">O(log n)</text:span><text:span text:style-name="T194"/></text:p>
          </table:table-cell>
          <table:table-cell table:style-name="表格47.A2" office:value-type="string">
            <text:p text:style-name="Standard" loext:marker-style-name="T194"><text:span text:style-name="T194">O(log n)</text:span><text:span text:style-name="T194"/></text:p>
          </table:table-cell>
        </table:table-row>
        <table:table-row table:style-name="表格47.1">
          <table:table-cell table:style-name="表格47.A3" office:value-type="string">
            <text:p text:style-name="Standard" loext:marker-style-name="T194"><text:span text:style-name="T194">Extract-Min/Max</text:span><text:span text:style-name="T194"/></text:p>
          </table:table-cell>
          <table:table-cell table:style-name="表格47.A3" office:value-type="string">
            <text:p text:style-name="Standard" loext:marker-style-name="T194"><text:span text:style-name="T194">O(log n)</text:span><text:span text:style-name="T194"/></text:p>
          </table:table-cell>
          <table:table-cell table:style-name="表格47.A3" office:value-type="string">
            <text:p text:style-name="Standard" loext:marker-style-name="T194"><text:span text:style-name="T194">O(log n)</text:span><text:span text:style-name="T194"/></text:p>
          </table:table-cell>
        </table:table-row>
        <table:table-row table:style-name="表格47.1">
          <table:table-cell table:style-name="表格47.A2" office:value-type="string">
            <text:p text:style-name="Standard" loext:marker-style-name="T194"><text:span text:style-name="T194">Merge</text:span><text:span text:style-name="T195">（合併兩個 </text:span><text:span text:style-name="T194">Heap</text:span><text:span text:style-name="T195">）</text:span></text:p>
          </table:table-cell>
          <table:table-cell table:style-name="表格47.A2" office:value-type="string">
            <text:p text:style-name="Standard" loext:marker-style-name="T194"><text:span text:style-name="T194">O(n+m) </text:span><text:span text:style-name="T195">重建</text:span></text:p>
          </table:table-cell>
          <table:table-cell table:style-name="表格47.A2" office:value-type="string">
            <text:p text:style-name="Standard" loext:marker-style-name="T194"><text:span text:style-name="T194">O(log n + log m) ★</text:span><text:span text:style-name="T194"/></text:p>
          </table:table-cell>
        </table:table-row>
      </table:table>
      <text:p text:style-name="P22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26" loext:marker-style-name="T127"><text:span text:style-name="T127">⚠️ <text:s/></text:span><text:span text:style-name="T128">重要：</text:span><text:span text:style-name="T127">Min vs. Max Leftist Heap</text:span></text:p>
            <text:p text:style-name="P26" loext:marker-style-name="T129"><text:span text:style-name="T129">Min Leftist Heap → Merge </text:span><text:span text:style-name="T130">時，較小的 </text:span><text:span text:style-name="T129">Root </text:span><text:span text:style-name="T130">成為新 </text:span><text:span text:style-name="T129">Root</text:span></text:p>
            <text:p text:style-name="P26" loext:marker-style-name="T129"><text:span text:style-name="T129">Max Leftist Heap → Merge </text:span><text:span text:style-name="T130">時，較大的 </text:span><text:span text:style-name="T129">Root </text:span><text:span text:style-name="T130">成為新 </text:span><text:span text:style-name="T129">Root</text:span></text:p>
            <text:p text:style-name="P28" loext:marker-style-name="T129"><text:span text:style-name="T130">演算法步驟完全相同，只有「誰當新 </text:span><text:span text:style-name="T129">Root</text:span><text:span text:style-name="T130">」的比較方向相反。</text:span></text:p>
          </table:table-cell>
        </table:table-row>
      </table:table>
      <text:h text:style-name="P36" text:outline-level="1" loext:marker-style-name="T110"/>
      <text:p text:style-name="P3"/>
      <text:h text:style-name="P4" text:outline-level="1" loext:marker-style-name="T7"><text:span text:style-name="T8">九、</text:span><text:span text:style-name="T9">Heap</text:span><text:span text:style-name="T56"> vs. </text:span><text:span text:style-name="T9">BST / AVL / Red-Black Tree</text:span><text:span text:style-name="T56"> </text:span><text:span text:style-name="T8">深度比較</text:span></text:h>
      <text:p text:style-name="P5" loext:marker-style-name="T58"><text:span text:style-name="T59">這是許多考生最容易混淆的地方，必須徹底釐清各資料結構的設計目的。</text:span><text:span text:style-name="T58"/></text:p>
      <text:p text:style-name="P3"/>
      <text:h text:style-name="P6" text:outline-level="2" loext:marker-style-name="T13"><text:soft-page-break/><text:span text:style-name="T14">各結構設計目的一覽</text:span><text:span text:style-name="T13"/></text:h>
      <text:p text:style-name="P3"/>
      <table:table table:name="表格49" table:style-name="表格49">
        <table:table-column table:style-name="表格49.A" table:number-columns-repeated="2"/>
        <table:table-column table:style-name="表格49.C"/>
        <table:table-header-rows>
          <table:table-row table:style-name="表格49.1">
            <table:table-cell table:style-name="表格49.A1" office:value-type="string">
              <text:p text:style-name="P10" loext:marker-style-name="T27"><text:span text:style-name="T28">結構</text:span><text:span text:style-name="T27"/></text:p>
            </table:table-cell>
            <table:table-cell table:style-name="表格49.A1" office:value-type="string">
              <text:p text:style-name="P10" loext:marker-style-name="T27"><text:span text:style-name="T28">設計目的</text:span><text:span text:style-name="T27"/></text:p>
            </table:table-cell>
            <table:table-cell table:style-name="表格49.A1" office:value-type="string">
              <text:p text:style-name="P10" loext:marker-style-name="T27"><text:span text:style-name="T28">核心保證</text:span><text:span text:style-name="T27"/></text:p>
            </table:table-cell>
          </table:table-row>
        </table:table-header-rows>
        <table:table-row table:style-name="表格49.1">
          <table:table-cell table:style-name="表格49.A2" office:value-type="string">
            <text:p text:style-name="P10" loext:marker-style-name="T22"><text:span text:style-name="T23">BST</text:span><text:span text:style-name="T22"/></text:p>
          </table:table-cell>
          <table:table-cell table:style-name="表格49.A2" office:value-type="string">
            <text:p text:style-name="P10" loext:marker-style-name="T22"><text:span text:style-name="T66">快速搜尋特定值</text:span><text:span text:style-name="T22"/></text:p>
          </table:table-cell>
          <table:table-cell table:style-name="表格49.A2" office:value-type="string">
            <text:p text:style-name="P10" loext:marker-style-name="T22"><text:span text:style-name="T66">左 </text:span><text:span text:style-name="T23">&lt; </text:span><text:span text:style-name="T66">根 </text:span><text:span text:style-name="T23">&lt; </text:span><text:span text:style-name="T66">右</text:span></text:p>
          </table:table-cell>
        </table:table-row>
        <table:table-row table:style-name="表格49.1">
          <table:table-cell table:style-name="表格49.A2" office:value-type="string">
            <text:p text:style-name="P10" loext:marker-style-name="T22"><text:span text:style-name="T23">AVL Tree</text:span><text:span text:style-name="T22"/></text:p>
          </table:table-cell>
          <table:table-cell table:style-name="表格49.A2" office:value-type="string">
            <text:p text:style-name="P10" loext:marker-style-name="T22"><text:span text:style-name="T66">平衡 </text:span><text:span text:style-name="T23">BST</text:span><text:span text:style-name="T66">，穩定搜尋</text:span></text:p>
          </table:table-cell>
          <table:table-cell table:style-name="表格49.A2" office:value-type="string">
            <text:p text:style-name="P10" loext:marker-style-name="T22"><text:span text:style-name="T66">高度差 ≤ </text:span><text:span text:style-name="T23">1</text:span><text:span text:style-name="T66">，</text:span><text:span text:style-name="T23">h = O(log n)</text:span></text:p>
          </table:table-cell>
        </table:table-row>
        <table:table-row table:style-name="表格49.1">
          <table:table-cell table:style-name="表格49.A2" office:value-type="string">
            <text:p text:style-name="P10" loext:marker-style-name="T22"><text:span text:style-name="T23">Red-Black Tree</text:span><text:span text:style-name="T22"/></text:p>
          </table:table-cell>
          <table:table-cell table:style-name="表格49.A2" office:value-type="string">
            <text:p text:style-name="P10" loext:marker-style-name="T22"><text:span text:style-name="T66">平衡 </text:span><text:span text:style-name="T23">BST</text:span><text:span text:style-name="T66">，減少旋轉</text:span></text:p>
          </table:table-cell>
          <table:table-cell table:style-name="表格49.A2" office:value-type="string">
            <text:p text:style-name="P10" loext:marker-style-name="T22"><text:span text:style-name="T66">顏色規則，</text:span><text:span text:style-name="T23">h = O(log n)</text:span></text:p>
          </table:table-cell>
        </table:table-row>
        <table:table-row table:style-name="表格49.1">
          <table:table-cell table:style-name="表格49.A2" office:value-type="string">
            <text:p text:style-name="P10" loext:marker-style-name="T22"><text:span text:style-name="T23">Heap</text:span><text:span text:style-name="T22"/></text:p>
          </table:table-cell>
          <table:table-cell table:style-name="表格49.A2" office:value-type="string">
            <text:p text:style-name="P10" loext:marker-style-name="T22"><text:span text:style-name="T66">快速取最大</text:span><text:span text:style-name="T23">/</text:span><text:span text:style-name="T66">最小值</text:span></text:p>
          </table:table-cell>
          <table:table-cell table:style-name="表格49.A2" office:value-type="string">
            <text:p text:style-name="P10" loext:marker-style-name="T22"><text:span text:style-name="T66">父 ≥ 子（</text:span><text:span text:style-name="T23">Max</text:span><text:span text:style-name="T66">）或父 ≤ 子（</text:span><text:span text:style-name="T23">Min</text:span><text:span text:style-name="T66">）</text:span></text:p>
          </table:table-cell>
        </table:table-row>
      </table:table>
      <text:p text:style-name="P3"/>
      <text:h text:style-name="P6" text:outline-level="2" loext:marker-style-name="T13"><text:span text:style-name="T14">時間複雜度全比較</text:span><text:span text:style-name="T13"/></text:h>
      <text:p text:style-name="P3"/>
      <table:table table:name="表格50" table:style-name="表格50">
        <table:table-column table:style-name="表格50.A" table:number-columns-repeated="4"/>
        <table:table-header-rows>
          <table:table-row table:style-name="表格50.1">
            <table:table-cell table:style-name="表格50.A1" office:value-type="string">
              <text:p text:style-name="P10" loext:marker-style-name="T27"><text:span text:style-name="T108">操作</text:span><text:span text:style-name="T27"/></text:p>
            </table:table-cell>
            <table:table-cell table:style-name="表格50.A1" office:value-type="string">
              <text:p text:style-name="P10" loext:marker-style-name="T27"><text:span text:style-name="T173">BST</text:span><text:span text:style-name="T108">（平衡）</text:span><text:span text:style-name="T173">/ AVL / RB</text:span></text:p>
            </table:table-cell>
            <table:table-cell table:style-name="表格50.A1" office:value-type="string">
              <text:p text:style-name="P10" loext:marker-style-name="T27"><text:span text:style-name="T173">Heap</text:span><text:span text:style-name="T27"/></text:p>
            </table:table-cell>
            <table:table-cell table:style-name="表格50.A1" office:value-type="string">
              <text:p text:style-name="P10" loext:marker-style-name="T27"><text:span text:style-name="T108">說明</text:span><text:span text:style-name="T27"/></text:p>
            </table:table-cell>
          </table:table-row>
        </table:table-header-rows>
        <table:table-row table:style-name="表格50.1">
          <table:table-cell table:style-name="表格50.A2" office:value-type="string">
            <text:p text:style-name="P10" loext:marker-style-name="T22"><text:span text:style-name="T66">搜尋特定值</text:span><text:span text:style-name="T22"/></text:p>
          </table:table-cell>
          <table:table-cell table:style-name="表格50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2" office:value-type="string">
            <text:p text:style-name="P10" loext:marker-style-name="T22"><text:span text:style-name="T23">❌ O(n)</text:span><text:span text:style-name="T22"/></text:p>
          </table:table-cell>
          <table:table-cell table:style-name="表格50.A2" office:value-type="string">
            <text:p text:style-name="P10" loext:marker-style-name="T22"><text:span text:style-name="T23">Heap </text:span><text:span text:style-name="T66">無排序規則</text:span></text:p>
          </table:table-cell>
        </table:table-row>
        <table:table-row table:style-name="表格50.1">
          <table:table-cell table:style-name="表格50.A3" office:value-type="string">
            <text:p text:style-name="P10" loext:marker-style-name="T22"><text:span text:style-name="T66">找最大值（</text:span><text:span text:style-name="T23">view</text:span><text:span text:style-name="T66">）</text:span></text:p>
          </table:table-cell>
          <table:table-cell table:style-name="表格50.A3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3" office:value-type="string">
            <text:p text:style-name="P10" loext:marker-style-name="T22"><text:span text:style-name="T23">✅ O(1)</text:span><text:span text:style-name="T22"/></text:p>
          </table:table-cell>
          <table:table-cell table:style-name="表格50.A3" office:value-type="string">
            <text:p text:style-name="P10" loext:marker-style-name="T22"><text:span text:style-name="T23">Heap Root </text:span><text:span text:style-name="T66">即最大值</text:span></text:p>
          </table:table-cell>
        </table:table-row>
        <table:table-row table:style-name="表格50.1">
          <table:table-cell table:style-name="表格50.A2" office:value-type="string">
            <text:p text:style-name="P10" loext:marker-style-name="T22"><text:span text:style-name="T23">Extract-Max</text:span><text:span text:style-name="T22"/></text:p>
          </table:table-cell>
          <table:table-cell table:style-name="表格50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2" office:value-type="string">
            <text:p text:style-name="P10" loext:marker-style-name="T22"><text:span text:style-name="T66">相同</text:span><text:span text:style-name="T22"/></text:p>
          </table:table-cell>
        </table:table-row>
        <table:table-row table:style-name="表格50.1">
          <table:table-cell table:style-name="表格50.A3" office:value-type="string">
            <text:p text:style-name="P10" loext:marker-style-name="T22"><text:span text:style-name="T23">Insert</text:span><text:span text:style-name="T22"/></text:p>
          </table:table-cell>
          <table:table-cell table:style-name="表格50.A3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3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3" office:value-type="string">
            <text:p text:style-name="P10" loext:marker-style-name="T22"><text:span text:style-name="T66">相同</text:span><text:span text:style-name="T22"/></text:p>
          </table:table-cell>
        </table:table-row>
        <table:table-row table:style-name="表格50.1">
          <table:table-cell table:style-name="表格50.A2" office:value-type="string">
            <text:p text:style-name="P10" loext:marker-style-name="T22"><text:span text:style-name="T23">Delete </text:span><text:span text:style-name="T66">任意</text:span></text:p>
          </table:table-cell>
          <table:table-cell table:style-name="表格50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2" office:value-type="string">
            <text:p text:style-name="P10" loext:marker-style-name="T22"><text:span text:style-name="T23">O(n) </text:span><text:span text:style-name="T66">找 </text:span><text:span text:style-name="T23">+ O(log n) </text:span><text:span text:style-name="T66">刪</text:span></text:p>
          </table:table-cell>
          <table:table-cell table:style-name="表格50.A2" office:value-type="string">
            <text:p text:style-name="P10" loext:marker-style-name="T22"><text:span text:style-name="T23">Heap </text:span><text:span text:style-name="T66">找到要刪的節點要 </text:span><text:span text:style-name="T23">O(n)</text:span></text:p>
          </table:table-cell>
        </table:table-row>
      </table:table>
      <text:p text:style-name="P3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9" loext:marker-style-name="T22"><text:span text:style-name="T23">⚠️ <text:s/></text:span><text:span text:style-name="T66">公職超高頻陷阱題：</text:span></text:p>
          </table:table-cell>
        </table:table-row>
        <table:table-row table:style-name="表格51.1">
          <table:table-cell table:style-name="表格51.A1" office:value-type="string">
            <text:p text:style-name="P9" loext:marker-style-name="T22"><text:span text:style-name="T66">「</text:span><text:span text:style-name="T23">Max Heap </text:span><text:span text:style-name="T66">搜尋某元素的時間複雜度為何？」</text:span></text:p>
          </table:table-cell>
        </table:table-row>
        <table:table-row table:style-name="表格51.1">
          <table:table-cell table:style-name="表格51.A1" office:value-type="string">
            <text:p text:style-name="P9"/>
          </table:table-cell>
        </table:table-row>
        <table:table-row table:style-name="表格51.1">
          <table:table-cell table:style-name="表格51.A1" office:value-type="string">
            <text:p text:style-name="P9" loext:marker-style-name="T22"><text:span text:style-name="T23">❌ </text:span><text:span text:style-name="T66">錯誤答案：</text:span><text:span text:style-name="T23">O(log n) <text:s/>← </text:span><text:span text:style-name="T66">看到樹就聯想 </text:span><text:span text:style-name="T23">log n </text:span><text:span text:style-name="T66">是常見誤區</text:span></text:p>
          </table:table-cell>
        </table:table-row>
        <table:table-row table:style-name="表格51.1">
          <table:table-cell table:style-name="表格51.A1" office:value-type="string">
            <text:p text:style-name="P9" loext:marker-style-name="T22"><text:span text:style-name="T23">✅ </text:span><text:span text:style-name="T66">正確答案：</text:span><text:span text:style-name="T23">O(n)</text:span></text:p>
          </table:table-cell>
        </table:table-row>
        <table:table-row table:style-name="表格51.1">
          <table:table-cell table:style-name="表格51.A1" office:value-type="string">
            <text:p text:style-name="P9"/>
          </table:table-cell>
        </table:table-row>
        <table:table-row table:style-name="表格51.1">
          <table:table-cell table:style-name="表格51.A1" office:value-type="string">
            <text:p text:style-name="P9" loext:marker-style-name="T22"><text:span text:style-name="T66">原因：</text:span><text:span text:style-name="T23">Heap </text:span><text:span text:style-name="T66">只保證「父 ≥ 子」，無法判斷目標在左或右子樹，</text:span></text:p>
          </table:table-cell>
        </table:table-row>
        <table:table-row table:style-name="表格51.1">
          <table:table-cell table:style-name="表格51.A1" office:value-type="string">
            <text:p text:style-name="P9" loext:marker-style-name="T22"><text:span text:style-name="T23"><text:s text:c="6"/></text:span><text:span text:style-name="T66">最壞情況需掃描所有節點。</text:span></text:p>
          </table:table-cell>
        </table:table-row>
      </table:table>
      <text:p text:style-name="P3"/>
      <text:h text:style-name="P6" text:outline-level="2" loext:marker-style-name="T13"><text:span text:style-name="T14">為什麼 </text:span><text:span text:style-name="T15">Linux</text:span><text:span text:style-name="T57"> </text:span><text:span text:style-name="T14">選擇 </text:span><text:span text:style-name="T15">Red-Black Tree</text:span><text:span text:style-name="T57"> </text:span><text:span text:style-name="T14">而非 </text:span><text:span text:style-name="T15">AVL</text:span><text:span text:style-name="T14">？</text:span></text:h>
      <text:list text:continue-list="list2604793170" text:style-name="WWNum2">
        <text:list-item>
          <text:p text:style-name="P19" loext:marker-style-name="T58"><text:span text:style-name="T62">AVL</text:span><text:span text:style-name="T59">：搜尋最快，但插入</text:span><text:span text:style-name="T62">/</text:span><text:span text:style-name="T59">刪除旋轉次數多，修改成本高。</text:span></text:p>
        </text:list-item>
        <text:list-item>
          <text:p text:style-name="P19" loext:marker-style-name="T58"><text:span text:style-name="T62">Red-Black Tree</text:span><text:span text:style-name="T59">：搜尋稍慢，但插入</text:span><text:span text:style-name="T62">/</text:span><text:span text:style-name="T59">刪除旋轉較少，整體效能均衡。</text:span></text:p>
        </text:list-item>
        <text:list-item>
          <text:p text:style-name="P19" loext:marker-style-name="T58"><text:span text:style-name="T62">Linux Kernel </text:span><text:span text:style-name="T59">的 </text:span><text:span text:style-name="T62">CFS </text:span><text:span text:style-name="T59">排程器、記憶體管理（</text:span><text:span text:style-name="T62">VMA</text:span><text:span text:style-name="T59">）、</text:span><text:span text:style-name="T62">Timer </text:span><text:span text:style-name="T59">均採用 </text:span><text:span text:style-name="T62">Red-Black Tree</text:span><text:span text:style-name="T59">。</text:span></text:p>
        </text:list-item>
      </text:list>
      <text:p text:style-name="P3"/>
      <text:p text:style-name="P3"/>
      <text:h text:style-name="P4" text:outline-level="1" loext:marker-style-name="T7"><text:soft-page-break/><text:span text:style-name="T8">十、公職考試常見陷阱整理</text:span><text:span text:style-name="T7"/></text:h>
      <text:p text:style-name="P3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9" loext:marker-style-name="T22"><text:span text:style-name="T66">陷阱 </text:span><text:span text:style-name="T23">1</text:span><text:span text:style-name="T66">：</text:span><text:span text:style-name="T23">Heap </text:span><text:span text:style-name="T66">搜尋 ≠ </text:span><text:span text:style-name="T23">O(log n)</text:span><text:span text:style-name="T66">，正確為 </text:span><text:span text:style-name="T23">O(n)</text:span><text:span text:style-name="T66">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66">陷阱 </text:span><text:span text:style-name="T23">2</text:span><text:span text:style-name="T66">：</text:span><text:span text:style-name="T23">Build Heap ≠ O(n log n)</text:span><text:span text:style-name="T66">，</text:span><text:span text:style-name="T23">Bottom-Up </text:span><text:span text:style-name="T66">法正確為 </text:span><text:span text:style-name="T23">O(n)</text:span><text:span text:style-name="T66">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66">陷阱 </text:span><text:span text:style-name="T23">3</text:span><text:span text:style-name="T66">：</text:span><text:span text:style-name="T23">Heap </text:span><text:span text:style-name="T66">是 </text:span><text:span text:style-name="T23">Complete Binary Tree</text:span><text:span text:style-name="T66">，不是 </text:span><text:span text:style-name="T23">Full Binary Tree</text:span><text:span text:style-name="T66">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66">陷阱 </text:span><text:span text:style-name="T23">4</text:span><text:span text:style-name="T66">：陣列索引從 </text:span><text:span text:style-name="T23">1 </text:span><text:span text:style-name="T66">開始，</text:span><text:span text:style-name="T23">parent = ⌊i/2⌋</text:span><text:span text:style-name="T66">（整數除法）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66">陷阱 </text:span><text:span text:style-name="T23">5</text:span><text:span text:style-name="T66">：</text:span><text:span text:style-name="T23">Interval Heap </text:span><text:span text:style-name="T66">每個節點存的是區間 </text:span><text:span text:style-name="T23">[min, max]</text:span><text:span text:style-name="T66">，不是單一值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66">陷阱 </text:span><text:span text:style-name="T23">6</text:span><text:span text:style-name="T66">：</text:span><text:span text:style-name="T23">Merge Leftist Heap </text:span><text:span text:style-name="T66">的新 </text:span><text:span text:style-name="T23">Root </text:span><text:span text:style-name="T66">是兩個 </text:span><text:span text:style-name="T23">Root </text:span><text:span text:style-name="T66">中較小的（</text:span><text:span text:style-name="T23">Min Heap</text:span><text:span text:style-name="T66">），</text:span></text:p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23"><text:s text:c="8"/>Max Leftist Heap </text:span><text:span text:style-name="T66">則是較大的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66">陷阱 </text:span><text:span text:style-name="T23">7</text:span><text:span text:style-name="T66">：</text:span><text:span text:style-name="T23">Heap Sort </text:span><text:span text:style-name="T66">是 </text:span><text:span text:style-name="T23">Unstable Sort</text:span><text:span text:style-name="T66">（不穩定排序）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66">陷阱 </text:span><text:span text:style-name="T23">8</text:span><text:span text:style-name="T66">：</text:span><text:span text:style-name="T23">Heap Sort </text:span><text:span text:style-name="T66">空間複雜度是 </text:span><text:span text:style-name="T23">O(1)</text:span><text:span text:style-name="T66">（</text:span><text:span text:style-name="T23">In-place</text:span><text:span text:style-name="T66">），不需額外空間。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十一、考試必背速查表（最終記憶版）</text:span><text:span text:style-name="T7"/></text:h>
      <text:p text:style-name="P3"/>
      <text:h text:style-name="P6" text:outline-level="2" loext:marker-style-name="T13"><text:span text:style-name="T14">核心定義</text:span><text:span text:style-name="T13"/>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9" loext:marker-style-name="T22"><text:span text:style-name="T23">Heap = Complete Binary Tree + Heap Property</text:span><text:span text:style-name="T66">（</text:span><text:span text:style-name="T23">parent ≤/≥ child</text:span><text:span text:style-name="T66">）</text:span></text:p>
          </table:table-cell>
        </table:table-row>
        <table:table-row table:style-name="表格53.1">
          <table:table-cell table:style-name="表格53.A1" office:value-type="string">
            <text:p text:style-name="P9"/>
          </table:table-cell>
        </table:table-row>
        <table:table-row table:style-name="表格53.1">
          <table:table-cell table:style-name="表格53.A1" office:value-type="string">
            <text:p text:style-name="P9" loext:marker-style-name="T22"><text:span text:style-name="T66">陣列索引（從 </text:span><text:span text:style-name="T23">1 </text:span><text:span text:style-name="T66">起）：</text:span></text:p>
          </table:table-cell>
        </table:table-row>
        <table:table-row table:style-name="表格53.1">
          <table:table-cell table:style-name="表格53.A1" office:value-type="string">
            <text:p text:style-name="P9" loext:marker-style-name="T22"><text:span text:style-name="T23"><text:s text:c="2"/>Root <text:s text:c="4"/>= A[1]</text:span><text:span text:style-name="T22"/></text:p>
          </table:table-cell>
        </table:table-row>
        <table:table-row table:style-name="表格53.1">
          <table:table-cell table:style-name="表格53.A1" office:value-type="string">
            <text:p text:style-name="P9" loext:marker-style-name="T22"><text:span text:style-name="T23"><text:s text:c="2"/>Parent(i) = A[⌊i/2⌋]</text:span><text:span text:style-name="T22"/></text:p>
          </table:table-cell>
        </table:table-row>
        <table:table-row table:style-name="表格53.1">
          <table:table-cell table:style-name="表格53.A1" office:value-type="string">
            <text:p text:style-name="P9" loext:marker-style-name="T22"><text:span text:style-name="T23"><text:s text:c="2"/>Left(i) <text:s/>= A[2i]</text:span><text:span text:style-name="T22"/></text:p>
          </table:table-cell>
        </table:table-row>
        <text:soft-page-break/>
        <table:table-row table:style-name="表格53.1">
          <table:table-cell table:style-name="表格53.A1" office:value-type="string">
            <text:p text:style-name="P9" loext:marker-style-name="T22"><text:span text:style-name="T23"><text:s text:c="2"/>Right(i) = A[2i+1]</text:span><text:span text:style-name="T22"/></text:p>
          </table:table-cell>
        </table:table-row>
      </table:table>
      <text:p text:style-name="P3"/>
      <text:h text:style-name="P6" text:outline-level="2" loext:marker-style-name="T13"><text:span text:style-name="T14">時間複雜度速查</text:span><text:span text:style-name="T13"/></text:h>
      <text:p text:style-name="P3"/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10" loext:marker-style-name="T27"><text:span text:style-name="T28">操作</text:span><text:span text:style-name="T27"/></text:p>
            </table:table-cell>
            <table:table-cell table:style-name="表格54.A1" office:value-type="string">
              <text:p text:style-name="P10" loext:marker-style-name="T27"><text:span text:style-name="T28">時間複雜度</text:span><text:span text:style-name="T27"/></text:p>
            </table:table-cell>
            <table:table-cell table:style-name="表格54.A1" office:value-type="string">
              <text:p text:style-name="P10" loext:marker-style-name="T27"><text:span text:style-name="T28">原因</text:span><text:span text:style-name="T27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10" loext:marker-style-name="T22"><text:span text:style-name="T23">Insert</text:span><text:span text:style-name="T66">（</text:span><text:span text:style-name="T23">Bubble Up</text:span><text:span text:style-name="T66">）</text:span></text:p>
          </table:table-cell>
          <table:table-cell table:style-name="表格54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4.A2" office:value-type="string">
            <text:p text:style-name="P10" loext:marker-style-name="T22"><text:span text:style-name="T66">最多走 </text:span><text:span text:style-name="T23">h = log n </text:span><text:span text:style-name="T66">層</text:span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23">Extract-Max</text:span><text:span text:style-name="T66">（</text:span><text:span text:style-name="T23">Heapify</text:span><text:span text:style-name="T66">）</text:span></text:p>
          </table:table-cell>
          <table:table-cell table:style-name="表格54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4.A2" office:value-type="string">
            <text:p text:style-name="P10" loext:marker-style-name="T22"><text:span text:style-name="T66">最多走 </text:span><text:span text:style-name="T23">h = log n </text:span><text:span text:style-name="T66">層</text:span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23">Build Heap</text:span><text:span text:style-name="T66">（</text:span><text:span text:style-name="T23">Bottom-Up</text:span><text:span text:style-name="T66">）</text:span></text:p>
          </table:table-cell>
          <table:table-cell table:style-name="表格54.A2" office:value-type="string">
            <text:p text:style-name="P10" loext:marker-style-name="T22"><text:span text:style-name="T23">O(n) ★</text:span><text:span text:style-name="T22"/></text:p>
          </table:table-cell>
          <table:table-cell table:style-name="表格54.A2" office:value-type="string">
            <text:p text:style-name="P10" loext:marker-style-name="T22"><text:span text:style-name="T23">Floyd </text:span><text:span text:style-name="T66">演算法</text:span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66">逐個 </text:span><text:span text:style-name="T23">Insert </text:span><text:span text:style-name="T66">建 </text:span><text:span text:style-name="T23">Heap</text:span></text:p>
          </table:table-cell>
          <table:table-cell table:style-name="表格54.A2" office:value-type="string">
            <text:p text:style-name="P10" loext:marker-style-name="T22"><text:span text:style-name="T23">O(n log n)</text:span><text:span text:style-name="T22"/></text:p>
          </table:table-cell>
          <table:table-cell table:style-name="表格54.A2" office:value-type="string">
            <text:p text:style-name="P10" loext:marker-style-name="T22"><text:span text:style-name="T23">n </text:span><text:span text:style-name="T66">次 </text:span><text:span text:style-name="T23">× O(log n)</text:span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23">Heap Sort</text:span><text:span text:style-name="T22"/></text:p>
          </table:table-cell>
          <table:table-cell table:style-name="表格54.A2" office:value-type="string">
            <text:p text:style-name="P10" loext:marker-style-name="T22"><text:span text:style-name="T23">O(n log n)</text:span><text:span text:style-name="T22"/></text:p>
          </table:table-cell>
          <table:table-cell table:style-name="表格54.A2" office:value-type="string">
            <text:p text:style-name="P10" loext:marker-style-name="T22"><text:span text:style-name="T23">O(n) + O(n log n)</text:span><text:span text:style-name="T22"/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66">搜尋特定值</text:span><text:span text:style-name="T22"/></text:p>
          </table:table-cell>
          <table:table-cell table:style-name="表格54.A2" office:value-type="string">
            <text:p text:style-name="P10" loext:marker-style-name="T22"><text:span text:style-name="T23">O(n)</text:span><text:span text:style-name="T22"/></text:p>
          </table:table-cell>
          <table:table-cell table:style-name="表格54.A2" office:value-type="string">
            <text:p text:style-name="P10" loext:marker-style-name="T22"><text:span text:style-name="T66">無左右排序規則</text:span><text:span text:style-name="T22"/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23">Merge (Leftist Heap)</text:span><text:span text:style-name="T22"/></text:p>
          </table:table-cell>
          <table:table-cell table:style-name="表格54.A2" office:value-type="string">
            <text:p text:style-name="P10" loext:marker-style-name="T22"><text:span text:style-name="T23">O(log n + log m)</text:span><text:span text:style-name="T22"/></text:p>
          </table:table-cell>
          <table:table-cell table:style-name="表格54.A2" office:value-type="string">
            <text:p text:style-name="P10" loext:marker-style-name="T22"><text:span text:style-name="T66">右側路徑短</text:span><text:span text:style-name="T22"/></text:p>
          </table:table-cell>
        </table:table-row>
      </table:table>
      <text:p text:style-name="P3"/>
      <text:h text:style-name="P6" text:outline-level="2" loext:marker-style-name="T13"><text:span text:style-name="T57">Priority Queue </text:span><text:span text:style-name="T14">三種實作比較</text:span></text:h>
      <text:p text:style-name="P3"/>
      <table:table table:name="表格55" table:style-name="表格55">
        <table:table-column table:style-name="表格55.A" table:number-columns-repeated="3"/>
        <table:table-header-rows>
          <table:table-row table:style-name="表格55.1">
            <table:table-cell table:style-name="表格55.A1" office:value-type="string">
              <text:p text:style-name="P10" loext:marker-style-name="T27"><text:span text:style-name="T28">實作</text:span><text:span text:style-name="T27"/></text:p>
            </table:table-cell>
            <table:table-cell table:style-name="表格55.A1" office:value-type="string">
              <text:p text:style-name="P10" loext:marker-style-name="T27"><text:span text:style-name="T108">Insert</text:span><text:span text:style-name="T27"/></text:p>
            </table:table-cell>
            <table:table-cell table:style-name="表格55.A1" office:value-type="string">
              <text:p text:style-name="P10" loext:marker-style-name="T27"><text:span text:style-name="T108">Extract-Max</text:span><text:span text:style-name="T27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10" loext:marker-style-name="T22"><text:span text:style-name="T66">排序陣列</text:span><text:span text:style-name="T22"/></text:p>
          </table:table-cell>
          <table:table-cell table:style-name="表格55.A2" office:value-type="string">
            <text:p text:style-name="P10" loext:marker-style-name="T22"><text:span text:style-name="T23">O(n)</text:span><text:span text:style-name="T22"/></text:p>
          </table:table-cell>
          <table:table-cell table:style-name="表格55.A2" office:value-type="string">
            <text:p text:style-name="P10" loext:marker-style-name="T22"><text:span text:style-name="T23">O(1) <text:s/></text:span><text:span text:style-name="T66">取快插慢</text:span></text:p>
          </table:table-cell>
        </table:table-row>
        <table:table-row table:style-name="表格55.1">
          <table:table-cell table:style-name="表格55.A2" office:value-type="string">
            <text:p text:style-name="P10" loext:marker-style-name="T22"><text:span text:style-name="T66">未排序陣列</text:span><text:span text:style-name="T22"/></text:p>
          </table:table-cell>
          <table:table-cell table:style-name="表格55.A2" office:value-type="string">
            <text:p text:style-name="P10" loext:marker-style-name="T22"><text:span text:style-name="T23">O(1)</text:span><text:span text:style-name="T22"/></text:p>
          </table:table-cell>
          <table:table-cell table:style-name="表格55.A2" office:value-type="string">
            <text:p text:style-name="P10" loext:marker-style-name="T22"><text:span text:style-name="T23">O(n) <text:s/></text:span><text:span text:style-name="T66">插快取慢</text:span></text:p>
          </table:table-cell>
        </table:table-row>
        <table:table-row table:style-name="表格55.1">
          <table:table-cell table:style-name="表格55.A4" office:value-type="string">
            <text:p text:style-name="P10" loext:marker-style-name="T22"><text:span text:style-name="T23">Max Heap ★</text:span><text:span text:style-name="T22"/></text:p>
          </table:table-cell>
          <table:table-cell table:style-name="表格55.A4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5.A4" office:value-type="string">
            <text:p text:style-name="P10" loext:marker-style-name="T22"><text:span text:style-name="T23">O(log n) <text:s/></text:span><text:span text:style-name="T66">最均衡</text:span></text:p>
          </table:table-cell>
        </table:table-row>
      </table:table>
      <text:p text:style-name="P3"/>
      <text:h text:style-name="P6" text:outline-level="2" loext:marker-style-name="T13"><text:span text:style-name="T57">8 </text:span><text:span text:style-name="T14">句考試必背口訣</text:span></text:h>
      <text:p text:style-name="P3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9" loext:marker-style-name="T22"><text:span text:style-name="T23">1. <text:s/>Heap = Complete BT + Heap Property</text:span><text:span text:style-name="T22"/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2. <text:s/>parent = A[⌊i/2⌋]</text:span><text:span text:style-name="T22"/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3. <text:s/>left child = A[2i]</text:span><text:span text:style-name="T22"/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4. <text:s/>right child = A[2i+1]</text:span><text:span text:style-name="T22"/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5. <text:s/>Insert → Bubble Up → O(log n)</text:span><text:span text:style-name="T22"/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6. <text:s/>Delete/Extract → Heapify</text:span><text:span text:style-name="T66">（</text:span><text:span text:style-name="T23">Bubble Down</text:span><text:span text:style-name="T66">）→ </text:span><text:span text:style-name="T23">O(log n)</text:span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7. <text:s/>Build Heap</text:span><text:span text:style-name="T66">（</text:span><text:span text:style-name="T23">Bottom-Up</text:span><text:span text:style-name="T66">）</text:span><text:span text:style-name="T23">= O(n) <text:s/>★ </text:span><text:span text:style-name="T66">非 </text:span><text:span text:style-name="T23">O(n log n)</text:span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8. <text:s/>Heap Sort = O(n log n)</text:span><text:span text:style-name="T66">，</text:span><text:span text:style-name="T23">In-place</text:span><text:span text:style-name="T66">，</text:span><text:span text:style-name="T23">Unstable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page" loext:hyphenation-keep-type="column" loext:hyphenation-keep-line="true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fo:font-weight="bold" style:letter-kerning="false" style:font-name-asian="Arial2" style:font-family-asian="Arial" style:font-family-generic-asian="system" style:font-pitch-asian="variable" style:font-size-asian="11pt" style:language-asian="zh" style:country-asian="TW" style:font-weight-asian="bold" style:font-name-complex="Arial2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Wingdings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complex="Wingdings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3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47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56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6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74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83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92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1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3T00:14:26</meta:creation-date>
    <meta:initial-creator>Un-named</meta:initial-creator>
    <dc:language>en-US</dc:language>
    <dc:date>2026-06-04T20:01:44.209922200</dc:date>
    <meta:editing-cycles>155</meta:editing-cycles>
    <meta:editing-duration>PT13H12M31S</meta:editing-duration>
    <meta:generator>LibreOffice/26.2.3.2$Windows_X86_64 LibreOffice_project/70e089b17412e4cb7773e41413306b17a2328c34</meta:generator>
    <meta:document-statistic meta:table-count="56" meta:image-count="0" meta:object-count="0" meta:page-count="30" meta:paragraph-count="822" meta:word-count="7409" meta:character-count="19651" meta:non-whitespace-character-count="12932"/>
    <meta:user-defined meta:name="AppVersion">15.0000</meta:user-defined>
  </office:meta>
</office:document-meta>
</file>