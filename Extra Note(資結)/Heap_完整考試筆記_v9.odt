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  <style:font-face style:name="Wingdings 21" svg:font-family="'Wingdings 2'" style:font-adornments="Regular" style:font-family-generic="roman" style:font-pitch="variable" style:font-charset="x-symbol"/>
    <style:font-face style:name="Wingdings1" svg:font-family="Wingdings" style:font-adornments="Regular" style:font-pitch="variable" style:font-charset="x-symbol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5.875cm" fo:margin-left="0cm" fo:margin-top="0cm" fo:margin-bottom="0cm" table:align="left" style:writing-mode="page"/>
    </style:style>
    <style:style style:name="表格1.A" style:family="table-column">
      <style:table-column-properties style:column-width="15.875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" style:family="table">
      <style:table-properties style:width="15.875cm" fo:margin-left="0.004cm" fo:margin-top="0cm" fo:margin-bottom="0cm" table:align="left" style:writing-mode="page"/>
    </style:style>
    <style:style style:name="表格2.A" style:family="table-column">
      <style:table-column-properties style:column-width="3.524cm"/>
    </style:style>
    <style:style style:name="表格2.B" style:family="table-column">
      <style:table-column-properties style:column-width="5.295cm"/>
    </style:style>
    <style:style style:name="表格2.C" style:family="table-column">
      <style:table-column-properties style:column-width="7.056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2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2.A3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3" style:family="table">
      <style:table-properties style:width="15.875cm" fo:margin-left="0cm" fo:margin-top="0cm" fo:margin-bottom="0cm" table:align="left" style:writing-mode="page"/>
    </style:style>
    <style:style style:name="表格3.A" style:family="table-column">
      <style:table-column-properties style:column-width="15.875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4" style:family="table">
      <style:table-properties style:width="15.875cm" fo:margin-left="0cm" fo:margin-top="0cm" fo:margin-bottom="0cm" table:align="left" style:writing-mode="page"/>
    </style:style>
    <style:style style:name="表格4.A" style:family="table-column">
      <style:table-column-properties style:column-width="15.875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5" style:family="table">
      <style:table-properties style:width="15.875cm" fo:margin-left="0cm" fo:margin-top="0cm" fo:margin-bottom="0cm" table:align="left" style:writing-mode="page"/>
    </style:style>
    <style:style style:name="表格5.A" style:family="table-column">
      <style:table-column-properties style:column-width="15.875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6" style:family="table">
      <style:table-properties style:width="15.875cm" fo:margin-left="0cm" fo:margin-top="0cm" fo:margin-bottom="0cm" table:align="left" style:writing-mode="page"/>
    </style:style>
    <style:style style:name="表格6.A" style:family="table-column">
      <style:table-column-properties style:column-width="15.875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ce4d6" fo:padding-left="0.282cm" fo:padding-right="0.282cm" fo:padding-top="0.106cm" fo:padding-bottom="0.106cm" fo:border="none">
        <style:background-image/>
      </style:table-cell-properties>
    </style:style>
    <style:style style:name="表格7" style:family="table">
      <style:table-properties style:width="15.875cm" fo:margin-left="0cm" fo:margin-top="0cm" fo:margin-bottom="0cm" table:align="left" style:writing-mode="page"/>
    </style:style>
    <style:style style:name="表格7.A" style:family="table-column">
      <style:table-column-properties style:column-width="15.875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8" style:family="table">
      <style:table-properties style:width="15.875cm" fo:margin-left="0cm" fo:margin-top="0cm" fo:margin-bottom="0cm" table:align="left" style:writing-mode="page"/>
    </style:style>
    <style:style style:name="表格8.A" style:family="table-column">
      <style:table-column-properties style:column-width="15.875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9" style:family="table">
      <style:table-properties style:width="15.875cm" fo:margin-left="0cm" fo:margin-top="0cm" fo:margin-bottom="0cm" table:align="left" style:writing-mode="page"/>
    </style:style>
    <style:style style:name="表格9.A" style:family="table-column">
      <style:table-column-properties style:column-width="15.875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0" style:family="table">
      <style:table-properties style:width="15.875cm" fo:margin-left="0cm" fo:margin-top="0cm" fo:margin-bottom="0cm" table:align="left" style:writing-mode="page"/>
    </style:style>
    <style:style style:name="表格10.A" style:family="table-column">
      <style:table-column-properties style:column-width="15.875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1" style:family="table">
      <style:table-properties style:width="15.875cm" fo:margin-left="0cm" fo:margin-top="0cm" fo:margin-bottom="0cm" table:align="left" style:writing-mode="page"/>
    </style:style>
    <style:style style:name="表格11.A" style:family="table-column">
      <style:table-column-properties style:column-width="15.875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2" style:family="table">
      <style:table-properties style:width="15.875cm" fo:margin-left="0cm" fo:margin-top="0cm" fo:margin-bottom="0cm" table:align="left" style:writing-mode="page"/>
    </style:style>
    <style:style style:name="表格12.A" style:family="table-column">
      <style:table-column-properties style:column-width="15.875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13" style:family="table">
      <style:table-properties style:width="15.875cm" fo:margin-left="0cm" fo:margin-top="0cm" fo:margin-bottom="0cm" table:align="left" style:writing-mode="page"/>
    </style:style>
    <style:style style:name="表格13.A" style:family="table-column">
      <style:table-column-properties style:column-width="15.875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4" style:family="table">
      <style:table-properties style:width="15.875cm" fo:margin-left="0cm" fo:margin-top="0cm" fo:margin-bottom="0cm" table:align="left" style:writing-mode="page"/>
    </style:style>
    <style:style style:name="表格14.A" style:family="table-column">
      <style:table-column-properties style:column-width="15.875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5" style:family="table">
      <style:table-properties style:width="15.875cm" fo:margin-left="0cm" fo:margin-top="0cm" fo:margin-bottom="0cm" table:align="left" style:writing-mode="page"/>
    </style:style>
    <style:style style:name="表格15.A" style:family="table-column">
      <style:table-column-properties style:column-width="15.875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6" style:family="table">
      <style:table-properties style:width="15.875cm" fo:margin-left="0cm" fo:margin-top="0cm" fo:margin-bottom="0cm" table:align="left" style:writing-mode="page"/>
    </style:style>
    <style:style style:name="表格16.A" style:family="table-column">
      <style:table-column-properties style:column-width="15.875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7" style:family="table">
      <style:table-properties style:width="15.875cm" fo:margin-left="0cm" fo:margin-top="0cm" fo:margin-bottom="0cm" table:align="left" style:writing-mode="page"/>
    </style:style>
    <style:style style:name="表格17.A" style:family="table-column">
      <style:table-column-properties style:column-width="15.875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8" style:family="table">
      <style:table-properties style:width="15.875cm" fo:margin-left="0cm" fo:margin-top="0cm" fo:margin-bottom="0cm" table:align="left" style:writing-mode="page"/>
    </style:style>
    <style:style style:name="表格18.A" style:family="table-column">
      <style:table-column-properties style:column-width="15.875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19" style:family="table">
      <style:table-properties style:width="15.875cm" fo:margin-left="0.004cm" fo:margin-top="0cm" fo:margin-bottom="0cm" table:align="left" style:writing-mode="page"/>
    </style:style>
    <style:style style:name="表格19.A" style:family="table-column">
      <style:table-column-properties style:column-width="5.292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19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19.A3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20" style:family="table">
      <style:table-properties style:width="15.875cm" fo:margin-left="0cm" fo:margin-top="0cm" fo:margin-bottom="0cm" table:align="left" style:writing-mode="page"/>
    </style:style>
    <style:style style:name="表格20.A" style:family="table-column">
      <style:table-column-properties style:column-width="15.875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21" style:family="table">
      <style:table-properties style:width="15.875cm" fo:margin-left="0cm" fo:margin-top="0cm" fo:margin-bottom="0cm" table:align="left" style:writing-mode="page"/>
    </style:style>
    <style:style style:name="表格21.A" style:family="table-column">
      <style:table-column-properties style:column-width="15.875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2" style:family="table">
      <style:table-properties style:width="15.875cm" fo:margin-left="0cm" fo:margin-top="0cm" fo:margin-bottom="0cm" table:align="left" style:writing-mode="page"/>
    </style:style>
    <style:style style:name="表格22.A" style:family="table-column">
      <style:table-column-properties style:column-width="15.875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3" style:family="table">
      <style:table-properties style:width="15.875cm" fo:margin-left="0.004cm" fo:margin-top="0cm" fo:margin-bottom="0cm" table:align="left" style:writing-mode="page"/>
    </style:style>
    <style:style style:name="表格23.A" style:family="table-column">
      <style:table-column-properties style:column-width="5.292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23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23.A4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24" style:family="table">
      <style:table-properties style:width="15.875cm" fo:margin-left="0cm" fo:margin-top="0cm" fo:margin-bottom="0cm" table:align="left" style:writing-mode="page"/>
    </style:style>
    <style:style style:name="表格24.A" style:family="table-column">
      <style:table-column-properties style:column-width="15.87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25" style:family="table">
      <style:table-properties style:width="15.875cm" fo:margin-left="0cm" fo:margin-top="0cm" fo:margin-bottom="0cm" table:align="left" style:writing-mode="page"/>
    </style:style>
    <style:style style:name="表格25.A" style:family="table-column">
      <style:table-column-properties style:column-width="15.875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6" style:family="table">
      <style:table-properties style:width="15.921cm" fo:margin-left="0.071cm" fo:margin-top="0cm" fo:margin-bottom="0cm" table:align="left" style:writing-mode="page"/>
    </style:style>
    <style:style style:name="表格26.A" style:family="table-column">
      <style:table-column-properties style:column-width="15.92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27" style:family="table">
      <style:table-properties style:width="15.921cm" fo:margin-left="0.071cm" fo:margin-top="0cm" fo:margin-bottom="0cm" table:align="left" style:writing-mode="page"/>
    </style:style>
    <style:style style:name="表格27.A" style:family="table-column">
      <style:table-column-properties style:column-width="15.92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28" style:family="table">
      <style:table-properties style:width="15.921cm" fo:margin-left="0.071cm" fo:margin-top="0cm" fo:margin-bottom="0cm" table:align="left" style:writing-mode="page"/>
    </style:style>
    <style:style style:name="表格28.A" style:family="table-column">
      <style:table-column-properties style:column-width="15.92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29" style:family="table">
      <style:table-properties style:width="15.921cm" fo:margin-left="0.071cm" fo:margin-top="0cm" fo:margin-bottom="0cm" table:align="left" style:writing-mode="page"/>
    </style:style>
    <style:style style:name="表格29.A" style:family="table-column">
      <style:table-column-properties style:column-width="15.92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30" style:family="table">
      <style:table-properties style:width="15.875cm" fo:margin-left="0cm" fo:margin-top="0cm" fo:margin-bottom="0cm" table:align="left" style:writing-mode="page"/>
    </style:style>
    <style:style style:name="表格30.A" style:family="table-column">
      <style:table-column-properties style:column-width="15.875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31" style:family="table">
      <style:table-properties style:width="15.875cm" fo:margin-left="0cm" fo:margin-top="0cm" fo:margin-bottom="0cm" table:align="left" style:writing-mode="page"/>
    </style:style>
    <style:style style:name="表格31.A" style:family="table-column">
      <style:table-column-properties style:column-width="15.875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2" style:family="table">
      <style:table-properties style:width="15.875cm" fo:margin-left="0cm" fo:margin-top="0cm" fo:margin-bottom="0cm" table:align="left" style:writing-mode="page"/>
    </style:style>
    <style:style style:name="表格32.A" style:family="table-column">
      <style:table-column-properties style:column-width="15.875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33" style:family="table">
      <style:table-properties style:width="15.875cm" fo:margin-left="0cm" fo:margin-top="0cm" fo:margin-bottom="0cm" table:align="left" style:writing-mode="page"/>
    </style:style>
    <style:style style:name="表格33.A" style:family="table-column">
      <style:table-column-properties style:column-width="15.875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34" style:family="table">
      <style:table-properties style:width="15.875cm" fo:margin-left="0cm" fo:margin-top="0cm" fo:margin-bottom="0cm" table:align="left" style:writing-mode="page"/>
    </style:style>
    <style:style style:name="表格34.A" style:family="table-column">
      <style:table-column-properties style:column-width="15.875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5" style:family="table">
      <style:table-properties style:width="15.875cm" fo:margin-left="0cm" fo:margin-top="0cm" fo:margin-bottom="0cm" table:align="left" style:writing-mode="page"/>
    </style:style>
    <style:style style:name="表格35.A" style:family="table-column">
      <style:table-column-properties style:column-width="15.875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6" style:family="table">
      <style:table-properties style:width="15.875cm" fo:margin-left="0cm" fo:margin-top="0cm" fo:margin-bottom="0cm" table:align="left" style:writing-mode="page"/>
    </style:style>
    <style:style style:name="表格36.A" style:family="table-column">
      <style:table-column-properties style:column-width="15.875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7" style:family="table">
      <style:table-properties style:width="15.875cm" fo:margin-left="0cm" fo:margin-top="0cm" fo:margin-bottom="0cm" table:align="left" style:writing-mode="page"/>
    </style:style>
    <style:style style:name="表格37.A" style:family="table-column">
      <style:table-column-properties style:column-width="15.875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38" style:family="table">
      <style:table-properties style:width="15.875cm" fo:margin-left="0cm" fo:margin-top="0cm" fo:margin-bottom="0cm" table:align="left" style:writing-mode="page"/>
    </style:style>
    <style:style style:name="表格38.A" style:family="table-column">
      <style:table-column-properties style:column-width="15.875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39" style:family="table">
      <style:table-properties style:width="15.921cm" fo:margin-left="0.009cm" fo:margin-top="0cm" fo:margin-bottom="0cm" table:align="left" style:writing-mode="page"/>
    </style:style>
    <style:style style:name="表格39.A" style:family="table-column">
      <style:table-column-properties style:column-width="4.41cm"/>
    </style:style>
    <style:style style:name="表格39.B" style:family="table-column">
      <style:table-column-properties style:column-width="3.528cm"/>
    </style:style>
    <style:style style:name="表格39.C" style:family="table-column">
      <style:table-column-properties style:column-width="3.524cm"/>
    </style:style>
    <style:style style:name="表格39.D" style:family="table-column">
      <style:table-column-properties style:column-width="4.459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2e75b6" fo:padding-left="0.212cm" fo:padding-right="0.212cm" fo:padding-top="0.141cm" fo:padding-bottom="0.141cm" fo:border="0.5pt solid #ffffff">
        <style:background-image/>
      </style:table-cell-properties>
    </style:style>
    <style:style style:name="表格39.A2" style:family="table-cell">
      <style:table-cell-properties fo:background-color="#ffffff" fo:padding-left="0.212cm" fo:padding-right="0.212cm" fo:padding-top="0.141cm" fo:padding-bottom="0.141cm" fo:border="0.5pt solid #cccccc">
        <style:background-image/>
      </style:table-cell-properties>
    </style:style>
    <style:style style:name="表格39.A3" style:family="table-cell">
      <style:table-cell-properties fo:background-color="#f0f5fa" fo:padding-left="0.212cm" fo:padding-right="0.212cm" fo:padding-top="0.141cm" fo:padding-bottom="0.141cm" fo:border="0.5pt solid #cccccc">
        <style:background-image/>
      </style:table-cell-properties>
    </style:style>
    <style:style style:name="表格40" style:family="table">
      <style:table-properties style:width="15.921cm" fo:margin-left="0.071cm" fo:margin-top="0cm" fo:margin-bottom="0cm" table:align="left" style:writing-mode="page"/>
    </style:style>
    <style:style style:name="表格40.A" style:family="table-column">
      <style:table-column-properties style:column-width="15.92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41" style:family="table">
      <style:table-properties style:width="15.921cm" fo:margin-left="0.071cm" fo:margin-top="0cm" fo:margin-bottom="0cm" table:align="left" style:writing-mode="page"/>
    </style:style>
    <style:style style:name="表格41.A" style:family="table-column">
      <style:table-column-properties style:column-width="15.92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2" style:family="table">
      <style:table-properties style:width="15.921cm" fo:margin-left="0.071cm" fo:margin-top="0cm" fo:margin-bottom="0cm" table:align="left" style:writing-mode="page"/>
    </style:style>
    <style:style style:name="表格42.A" style:family="table-column">
      <style:table-column-properties style:column-width="15.921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43" style:family="table">
      <style:table-properties style:width="15.921cm" fo:margin-left="0.071cm" fo:margin-top="0cm" fo:margin-bottom="0cm" table:align="left" style:writing-mode="page"/>
    </style:style>
    <style:style style:name="表格43.A" style:family="table-column">
      <style:table-column-properties style:column-width="15.92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4" style:family="table">
      <style:table-properties style:width="15.921cm" fo:margin-left="0.071cm" fo:margin-top="0cm" fo:margin-bottom="0cm" table:align="left" style:writing-mode="page"/>
    </style:style>
    <style:style style:name="表格44.A" style:family="table-column">
      <style:table-column-properties style:column-width="15.921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5" style:family="table">
      <style:table-properties style:width="15.921cm" fo:margin-left="0.071cm" fo:margin-top="0cm" fo:margin-bottom="0cm" table:align="left" style:writing-mode="page"/>
    </style:style>
    <style:style style:name="表格45.A" style:family="table-column">
      <style:table-column-properties style:column-width="15.92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6" style:family="table">
      <style:table-properties style:width="15.921cm" fo:margin-left="0.071cm" fo:margin-top="0cm" fo:margin-bottom="0cm" table:align="left" style:writing-mode="page"/>
    </style:style>
    <style:style style:name="表格46.A" style:family="table-column">
      <style:table-column-properties style:column-width="15.921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47" style:family="table">
      <style:table-properties style:width="15.921cm" fo:margin-left="0.009cm" fo:margin-top="0cm" fo:margin-bottom="0cm" table:align="left" style:writing-mode="page"/>
    </style:style>
    <style:style style:name="表格47.A" style:family="table-column">
      <style:table-column-properties style:column-width="4.935cm"/>
    </style:style>
    <style:style style:name="表格47.B" style:family="table-column">
      <style:table-column-properties style:column-width="5.472cm"/>
    </style:style>
    <style:style style:name="表格47.C" style:family="table-column">
      <style:table-column-properties style:column-width="5.514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2e75b6" fo:padding-left="0.212cm" fo:padding-right="0.212cm" fo:padding-top="0.141cm" fo:padding-bottom="0.141cm" fo:border="0.5pt solid #ffffff">
        <style:background-image/>
      </style:table-cell-properties>
    </style:style>
    <style:style style:name="表格47.A2" style:family="table-cell">
      <style:table-cell-properties fo:background-color="#ffffff" fo:padding-left="0.212cm" fo:padding-right="0.212cm" fo:padding-top="0.141cm" fo:padding-bottom="0.141cm" fo:border="0.5pt solid #cccccc">
        <style:background-image/>
      </style:table-cell-properties>
    </style:style>
    <style:style style:name="表格47.A3" style:family="table-cell">
      <style:table-cell-properties fo:background-color="#f0f5fa" fo:padding-left="0.212cm" fo:padding-right="0.212cm" fo:padding-top="0.141cm" fo:padding-bottom="0.141cm" fo:border="0.5pt solid #cccccc">
        <style:background-image/>
      </style:table-cell-properties>
    </style:style>
    <style:style style:name="表格48" style:family="table">
      <style:table-properties style:width="15.921cm" fo:margin-left="0.071cm" fo:margin-top="0cm" fo:margin-bottom="0cm" table:align="left" style:writing-mode="page"/>
    </style:style>
    <style:style style:name="表格48.A" style:family="table-column">
      <style:table-column-properties style:column-width="15.92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49" style:family="table">
      <style:table-properties style:width="15.875cm" fo:margin-left="0.004cm" fo:margin-top="0cm" fo:margin-bottom="0cm" table:align="left" style:writing-mode="page"/>
    </style:style>
    <style:style style:name="表格49.A" style:family="table-column">
      <style:table-column-properties style:column-width="3.969cm"/>
    </style:style>
    <style:style style:name="表格49.C" style:family="table-column">
      <style:table-column-properties style:column-width="7.938cm"/>
    </style:style>
    <style:style style:name="表格49.1" style:family="table-row">
      <style:table-row-properties fo:keep-together="auto"/>
    </style:style>
    <style:style style:name="表格49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49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50" style:family="table">
      <style:table-properties style:width="15.875cm" fo:margin-left="0.004cm" fo:margin-top="0cm" fo:margin-bottom="0cm" table:align="left" style:writing-mode="page"/>
    </style:style>
    <style:style style:name="表格50.A" style:family="table-column">
      <style:table-column-properties style:column-width="3.969cm"/>
    </style:style>
    <style:style style:name="表格50.1" style:family="table-row">
      <style:table-row-properties fo:keep-together="auto"/>
    </style:style>
    <style:style style:name="表格50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50.A2" style:family="table-cell">
      <style:table-cell-properties style:vertical-align="middle" fo:background-color="#ffffff" fo:padding-left="0.212cm" fo:padding-right="0.212cm" fo:padding-top="0.141cm" fo:padding-bottom="0.141cm" fo:border="0.25pt solid #9dc3e6">
        <style:background-image/>
      </style:table-cell-properties>
    </style:style>
    <style:style style:name="表格50.A3" style:family="table-cell">
      <style:table-cell-properties style:vertical-align="middle" fo:background-color="#ebf3fb" fo:padding-left="0.212cm" fo:padding-right="0.212cm" fo:padding-top="0.141cm" fo:padding-bottom="0.141cm" fo:border="0.25pt solid #9dc3e6">
        <style:background-image/>
      </style:table-cell-properties>
    </style:style>
    <style:style style:name="表格51" style:family="table">
      <style:table-properties style:width="15.875cm" fo:margin-left="0cm" fo:margin-top="0cm" fo:margin-bottom="0cm" table:align="left" style:writing-mode="page"/>
    </style:style>
    <style:style style:name="表格51.A" style:family="table-column">
      <style:table-column-properties style:column-width="15.875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52" style:family="table">
      <style:table-properties style:width="15.875cm" fo:margin-left="0cm" fo:margin-top="0cm" fo:margin-bottom="0cm" table:align="left" style:writing-mode="page"/>
    </style:style>
    <style:style style:name="表格52.A" style:family="table-column">
      <style:table-column-properties style:column-width="15.875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53" style:family="table">
      <style:table-properties style:width="15.875cm" fo:margin-left="0cm" fo:margin-top="0cm" fo:margin-bottom="0cm" table:align="left" style:writing-mode="page"/>
    </style:style>
    <style:style style:name="表格53.A" style:family="table-column">
      <style:table-column-properties style:column-width="15.875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54" style:family="table">
      <style:table-properties style:width="15.875cm" fo:margin-left="0.004cm" fo:margin-top="0cm" fo:margin-bottom="0cm" table:align="left" style:writing-mode="page"/>
    </style:style>
    <style:style style:name="表格54.A" style:family="table-column">
      <style:table-column-properties style:column-width="5.292cm"/>
    </style:style>
    <style:style style:name="表格54.B" style:family="table-column">
      <style:table-column-properties style:column-width="3.528cm"/>
    </style:style>
    <style:style style:name="表格54.C" style:family="table-column">
      <style:table-column-properties style:column-width="7.056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54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55" style:family="table">
      <style:table-properties style:width="15.875cm" fo:margin-left="0.004cm" fo:margin-top="0cm" fo:margin-bottom="0cm" table:align="left" style:writing-mode="page"/>
    </style:style>
    <style:style style:name="表格55.A" style:family="table-column">
      <style:table-column-properties style:column-width="5.292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55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55.A4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56" style:family="table">
      <style:table-properties style:width="15.875cm" fo:margin-left="0cm" fo:margin-top="0cm" fo:margin-bottom="0cm" table:align="left" style:writing-mode="page"/>
    </style:style>
    <style:style style:name="表格56.A" style:family="table-column">
      <style:table-column-properties style:column-width="15.875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P1" style:family="paragraph" style:parent-style-name="Standard">
      <style:paragraph-properties fo:margin-top="0.071cm" fo:margin-bottom="0.071cm" style:contextual-spacing="false"/>
    </style:style>
    <style:style style:name="P2" style:family="paragraph" style:parent-style-name="Standard">
      <style:paragraph-properties fo:margin-top="0.053cm" fo:margin-bottom="0.053cm" style:contextual-spacing="false"/>
    </style:style>
    <style:style style:name="P3" style:family="paragraph" style:parent-style-name="Heading_20_1">
      <style:paragraph-properties fo:margin-left="0cm" fo:margin-right="0cm" fo:margin-top="0.847cm" fo:margin-bottom="0.353cm" style:contextual-spacing="false" fo:text-indent="0cm" style:auto-text-indent="false" fo:padding="0cm" fo:border-left="none" fo:border-right="none" fo:border-top="none" fo:border-bottom="2.01pt solid #2e75b6"/>
    </style:style>
    <style:style style:name="P4" style:family="paragraph" style:parent-style-name="Heading_20_2">
      <style:paragraph-properties fo:margin-left="0cm" fo:margin-right="0cm" fo:margin-top="0.529cm" fo:margin-bottom="0.247cm" style:contextual-spacing="false" fo:text-indent="0cm" style:auto-text-indent="false"/>
    </style:style>
    <style:style style:name="P5" style:family="paragraph" style:parent-style-name="Standard">
      <style:paragraph-properties fo:margin-top="0cm" fo:margin-bottom="0.212cm" style:contextual-spacing="false"/>
    </style:style>
    <style:style style:name="P6" style:family="paragraph" style:parent-style-name="Standard">
      <loext:graphic-properties draw:fill="solid" draw:fill-color="#f4f6f9"/>
      <style:paragraph-properties fo:margin-left="0.494cm" fo:margin-right="0.353cm" fo:margin-top="0cm" fo:margin-bottom="0cm" style:contextual-spacing="false" fo:text-indent="0cm" style:auto-text-indent="false" fo:background-color="#f4f6f9" fo:padding="0cm" fo:border-left="4pt solid #2e75b6" fo:border-right="0.51pt solid #bbbbbb" fo:border-top="none" fo:border-bottom="none" style:shadow="none"/>
    </style:style>
    <style:style style:name="P7" style:family="paragraph" style:parent-style-name="Standard">
      <style:paragraph-properties fo:margin-top="0cm" fo:margin-bottom="0.141cm" style:contextual-spacing="false"/>
    </style:style>
    <style:style style:name="P8" style:family="paragraph" style:parent-style-name="Standard">
      <style:paragraph-properties fo:margin-top="0cm" fo:margin-bottom="0.282cm" style:contextual-spacing="false"/>
    </style:style>
    <style:style style:name="P9" style:family="paragraph" style:parent-style-name="Standard">
      <loext:graphic-properties draw:fill="solid" draw:fill-color="#f4f6f9"/>
      <style:paragraph-properties fo:margin-left="0.494cm" fo:margin-right="0.353cm" fo:margin-top="0cm" fo:margin-bottom="0cm" style:contextual-spacing="false" fo:text-indent="0cm" style:auto-text-indent="false" fo:background-color="#f4f6f9" fo:padding="0cm" fo:border-left="4pt solid #2e75b6" fo:border-right="0.51pt solid #bbbbbb" fo:border-top="none" fo:border-bottom="none" style:shadow="none"/>
      <style:text-properties fo:color="#2b2b2b" loext:opacity="100%" style:font-name="Courier New" fo:font-size="9.5pt" style:font-name-asian="Courier New1" style:font-size-asian="9.5pt" style:font-name-complex="Courier New1" style:font-size-complex="9.5pt"/>
    </style:style>
    <style:style style:name="P10" style:family="paragraph" style:parent-style-name="Standard">
      <loext:graphic-properties draw:fill="solid" draw:fill-color="#f4f6f9"/>
      <style:paragraph-properties fo:margin-left="0.494cm" fo:margin-right="0.353cm" fo:margin-top="0.141cm" fo:margin-bottom="0cm" style:contextual-spacing="false" fo:text-indent="0cm" style:auto-text-indent="false" fo:background-color="#f4f6f9" fo:padding="0cm" fo:border-left="4pt solid #2e75b6" fo:border-right="0.51pt solid #bbbbbb" fo:border-top="0.51pt solid #bbbbbb" fo:border-bottom="none" style:shadow="none"/>
      <style:text-properties fo:color="#2b2b2b" loext:opacity="100%" style:font-name="Courier New" fo:font-size="9.5pt" style:font-name-asian="Courier New1" style:font-size-asian="9.5pt" style:font-name-complex="Courier New1" style:font-size-complex="9.5pt"/>
    </style:style>
    <style:style style:name="P11" style:family="paragraph" style:parent-style-name="Standard">
      <style:paragraph-properties fo:margin-top="0.053cm" fo:margin-bottom="0.053cm" style:contextual-spacing="false"/>
      <style:text-properties fo:color="#ff3d00" loext:opacity="100%" fo:font-weight="bold" fo:background-color="#64ffda" style:font-weight-asian="bold" style:font-weight-complex="bold"/>
    </style:style>
    <style:style style:name="P12" style:family="paragraph" style:parent-style-name="Standard">
      <style:paragraph-properties fo:margin-top="0cm" fo:margin-bottom="0.071cm" style:contextual-spacing="false"/>
    </style:style>
    <style:style style:name="P13" style:family="paragraph" style:parent-style-name="Heading_20_1">
      <style:paragraph-properties fo:margin-left="0cm" fo:margin-right="0cm" fo:margin-top="0.529cm" fo:margin-bottom="0.212cm" style:contextual-spacing="false" fo:text-indent="0cm" style:auto-text-indent="false" fo:padding-left="0cm" fo:padding-right="0cm" fo:padding-top="0cm" fo:padding-bottom="0.141cm" fo:border-left="none" fo:border-right="none" fo:border-top="none" fo:border-bottom="0.99pt solid #2e75b6"/>
    </style:style>
    <style:style style:name="P14" style:family="paragraph" style:parent-style-name="Heading_20_1">
      <style:paragraph-properties fo:margin-left="0cm" fo:margin-right="0cm" fo:margin-top="0.847cm" fo:margin-bottom="0.353cm" style:contextual-spacing="false" fo:text-indent="0cm" style:auto-text-indent="false" fo:padding="0cm" fo:border-left="none" fo:border-right="none" fo:border-top="none" fo:border-bottom="2.01pt solid #2e75b6"/>
    </style:style>
    <style:style style:name="P15" style:family="paragraph" style:parent-style-name="Heading_20_1">
      <style:paragraph-properties fo:margin-left="0cm" fo:margin-right="0cm" fo:margin-top="0.847cm" fo:margin-bottom="0.353cm" style:contextual-spacing="false" fo:text-indent="0cm" style:auto-text-indent="false" fo:padding="0cm" fo:border-left="none" fo:border-right="none" fo:border-top="none" fo:border-bottom="2.01pt solid #2e75b6"/>
      <style:text-properties fo:color="#1f3864" loext:opacity="100%" style:font-name="Arial1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P16" style:family="paragraph" style:parent-style-name="Heading_20_2">
      <style:paragraph-properties fo:margin-left="0cm" fo:margin-right="0cm" fo:margin-top="0.423cm" fo:margin-bottom="0.141cm" style:contextual-spacing="false" fo:text-indent="0cm" style:auto-text-indent="false"/>
    </style:style>
    <style:style style:name="P17" style:family="paragraph" style:parent-style-name="Heading_20_2">
      <style:paragraph-properties fo:margin-left="0cm" fo:margin-right="0cm" fo:margin-top="0.529cm" fo:margin-bottom="0.247cm" style:contextual-spacing="false" fo:text-indent="0cm" style:auto-text-indent="false"/>
    </style:style>
    <style:style style:name="P18" style:family="paragraph" style:parent-style-name="Heading_20_2">
      <style:paragraph-properties fo:margin-left="0cm" fo:margin-right="0cm" fo:margin-top="0.423cm" fo:margin-bottom="0.141cm" style:contextual-spacing="false" fo:text-indent="0cm" style:auto-text-indent="false"/>
    </style:style>
    <style:style style:name="P19" style:family="paragraph" style:parent-style-name="List_20_Paragraph" style:list-style-name="WWNum5">
      <style:paragraph-properties fo:margin-left="1.27cm" fo:margin-right="0cm" fo:margin-top="0.071cm" fo:margin-bottom="0.071cm" style:contextual-spacing="false" fo:text-indent="-0.635cm" style:auto-text-indent="false"/>
    </style:style>
    <style:style style:name="P20" style:family="paragraph" style:parent-style-name="List_20_Paragraph" style:list-style-name="WWNum6">
      <style:paragraph-properties fo:margin-left="1.27cm" fo:margin-right="0cm" fo:margin-top="0.071cm" fo:margin-bottom="0.071cm" style:contextual-spacing="false" fo:text-indent="-0.635cm" style:auto-text-indent="false"/>
    </style:style>
    <style:style style:name="P21" style:family="paragraph" style:parent-style-name="List_20_Paragraph" style:list-style-name="WWNum7">
      <style:paragraph-properties fo:margin-left="1.27cm" fo:margin-right="0cm" fo:margin-top="0.071cm" fo:margin-bottom="0.071cm" style:contextual-spacing="false" fo:text-indent="-0.635cm" style:auto-text-indent="false"/>
    </style:style>
    <style:style style:name="P22" style:family="paragraph" style:parent-style-name="List_20_Paragraph" style:list-style-name="WWNum8">
      <style:paragraph-properties fo:margin-left="1.27cm" fo:margin-right="0cm" fo:margin-top="0.071cm" fo:margin-bottom="0.071cm" style:contextual-spacing="false" fo:text-indent="-0.635cm" style:auto-text-indent="false"/>
    </style:style>
    <style:style style:name="P23" style:family="paragraph" style:parent-style-name="List_20_Paragraph" style:list-style-name="WWNum9">
      <style:paragraph-properties fo:margin-left="1.27cm" fo:margin-right="0cm" fo:margin-top="0.071cm" fo:margin-bottom="0.071cm" style:contextual-spacing="false" fo:text-indent="-0.635cm" style:auto-text-indent="false"/>
    </style:style>
    <style:style style:name="P24" style:family="paragraph" style:parent-style-name="List_20_Paragraph" style:list-style-name="WWNum10">
      <style:paragraph-properties fo:margin-left="1.27cm" fo:margin-right="0cm" fo:margin-top="0.071cm" fo:margin-bottom="0.071cm" style:contextual-spacing="false" fo:text-indent="-0.635cm" style:auto-text-indent="false"/>
    </style:style>
    <style:style style:name="P25" style:family="paragraph" style:parent-style-name="List_20_Paragraph" style:list-style-name="WWNum11">
      <style:paragraph-properties fo:margin-left="1.27cm" fo:margin-right="0cm" fo:margin-top="0.071cm" fo:margin-bottom="0.071cm" style:contextual-spacing="false" fo:text-indent="-0.635cm" style:auto-text-indent="false"/>
    </style:style>
    <style:style style:name="P26" style:family="paragraph" style:parent-style-name="List_20_Paragraph" style:list-style-name="WWNum12">
      <style:paragraph-properties fo:margin-left="1.27cm" fo:margin-right="0cm" fo:margin-top="0.071cm" fo:margin-bottom="0.071cm" style:contextual-spacing="false" fo:text-indent="-0.635cm" style:auto-text-indent="false"/>
    </style:style>
    <style:style style:name="P27" style:family="paragraph" style:parent-style-name="List_20_Paragraph" style:list-style-name="WWNum13">
      <style:paragraph-properties fo:margin-left="1.27cm" fo:margin-right="0cm" fo:margin-top="0.071cm" fo:margin-bottom="0.071cm" style:contextual-spacing="false" fo:text-indent="-0.635cm" style:auto-text-indent="false"/>
    </style:style>
    <style:style style:name="P28" style:family="paragraph" style:parent-style-name="List_20_Paragraph" style:list-style-name="WWNum14">
      <style:paragraph-properties fo:margin-top="0cm" fo:margin-bottom="0.141cm" style:contextual-spacing="false"/>
    </style:style>
    <style:style style:name="P29" style:family="paragraph" style:parent-style-name="Standard">
      <style:paragraph-properties fo:margin-top="0cm" fo:margin-bottom="0.106cm" style:contextual-spacing="false" fo:text-align="center" style:justify-single-word="false"/>
    </style:style>
    <style:style style:name="P30" style:family="paragraph" style:parent-style-name="Standard">
      <style:paragraph-properties fo:margin-top="0cm" fo:margin-bottom="0.141cm" style:contextual-spacing="false" fo:text-align="center" style:justify-single-word="false" fo:padding-left="0cm" fo:padding-right="0cm" fo:padding-top="0cm" fo:padding-bottom="0.212cm" fo:border-left="none" fo:border-right="none" fo:border-top="none" fo:border-bottom="1.5pt solid #2e75b6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>
      <style:paragraph-properties fo:margin-top="0.106cm" fo:margin-bottom="0.106cm" style:contextual-spacing="false"/>
    </style:style>
    <style:style style:name="P33" style:family="paragraph" style:parent-style-name="Standard">
      <style:paragraph-properties fo:margin-top="0.053cm" fo:margin-bottom="0.053cm" style:contextual-spacing="false"/>
    </style:style>
    <style:style style:name="P34" style:family="paragraph" style:parent-style-name="Standard">
      <style:paragraph-properties fo:margin-top="0.318cm" fo:margin-bottom="0.106cm" style:contextual-spacing="false"/>
    </style:style>
    <style:style style:name="P35" style:family="paragraph" style:parent-style-name="Standard" style:list-style-name="WWNum2">
      <style:paragraph-properties fo:margin-top="0.071cm" fo:margin-bottom="0.071cm" style:contextual-spacing="false"/>
    </style:style>
    <style:style style:name="P36" style:family="paragraph" style:parent-style-name="Standard">
      <style:paragraph-properties fo:margin-top="0cm" fo:margin-bottom="0.212cm" style:contextual-spacing="false"/>
    </style:style>
    <style:style style:name="P37" style:family="paragraph" style:parent-style-name="Standard">
      <loext:graphic-properties draw:fill="solid" draw:fill-color="#f4f6f9"/>
      <style:paragraph-properties fo:margin-left="0.494cm" fo:margin-right="0.353cm" fo:margin-top="0.141cm" fo:margin-bottom="0cm" style:contextual-spacing="false" fo:text-indent="0cm" style:auto-text-indent="false" fo:background-color="#f4f6f9" fo:padding="0cm" fo:border-left="4pt solid #2e75b6" fo:border-right="0.51pt solid #bbbbbb" fo:border-top="0.51pt solid #bbbbbb" fo:border-bottom="none" style:shadow="none"/>
    </style:style>
    <style:style style:name="P38" style:family="paragraph" style:parent-style-name="Standard">
      <loext:graphic-properties draw:fill="solid" draw:fill-color="#f4f6f9"/>
      <style:paragraph-properties fo:margin-left="0.494cm" fo:margin-right="0.353cm" fo:margin-top="0cm" fo:margin-bottom="0cm" style:contextual-spacing="false" fo:text-indent="0cm" style:auto-text-indent="false" fo:background-color="#f4f6f9" fo:padding="0cm" fo:border-left="4pt solid #2e75b6" fo:border-right="0.51pt solid #bbbbbb" fo:border-top="none" fo:border-bottom="none" style:shadow="none"/>
    </style:style>
    <style:style style:name="P39" style:family="paragraph" style:parent-style-name="Standard">
      <loext:graphic-properties draw:fill="solid" draw:fill-color="#f4f6f9"/>
      <style:paragraph-properties fo:margin-left="0.494cm" fo:margin-right="0.353cm" fo:margin-top="0cm" fo:margin-bottom="0.141cm" style:contextual-spacing="false" fo:text-indent="0cm" style:auto-text-indent="false" fo:background-color="#f4f6f9" fo:padding="0cm" fo:border-left="4pt solid #2e75b6" fo:border-right="0.51pt solid #bbbbbb" fo:border-top="none" fo:border-bottom="0.51pt solid #bbbbbb" style:shadow="none"/>
    </style:style>
    <style:style style:name="P40" style:family="paragraph" style:parent-style-name="Standard">
      <style:paragraph-properties fo:margin-top="0cm" fo:margin-bottom="0.141cm" style:contextual-spacing="false"/>
    </style:style>
    <style:style style:name="P41" style:family="paragraph" style:parent-style-name="Standard">
      <style:paragraph-properties fo:margin-top="0cm" fo:margin-bottom="0cm" style:contextual-spacing="false"/>
    </style:style>
    <style:style style:name="P42" style:family="paragraph" style:parent-style-name="Standard">
      <style:paragraph-properties fo:margin-top="0.353cm" fo:margin-bottom="0.176cm" style:contextual-spacing="false"/>
    </style:style>
    <style:style style:name="P43" style:family="paragraph" style:parent-style-name="Standard">
      <style:paragraph-properties fo:margin-top="0.053cm" fo:margin-bottom="0.053cm" style:contextual-spacing="false"/>
      <style:text-properties officeooo:paragraph-rsid="00542c65"/>
    </style:style>
    <style:style style:name="P44" style:family="paragraph" style:parent-style-name="Standard">
      <style:paragraph-properties fo:margin-top="0.053cm" fo:margin-bottom="0.053cm" style:contextual-spacing="false"/>
      <style:text-properties officeooo:paragraph-rsid="00554de0"/>
    </style:style>
    <style:style style:name="T1" style:family="text">
      <style:text-properties fo:color="#1f4e79" loext:opacity="100%" style:font-name="Arial1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2" style:family="text">
      <style:text-properties fo:color="#1f4e79" loext:opacity="100%" style:font-name="Arial1" fo:font-size="20pt" fo:font-weight="bold" style:font-size-asian="20pt" style:font-weight-asian="bold" style:font-name-complex="Arial2" style:font-size-complex="20pt" style:font-weight-complex="bold"/>
    </style:style>
    <style:style style:name="T3" style:family="text">
      <style:text-properties fo:color="#1f4e79" loext:opacity="100%" style:font-name="Arial1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4" style:family="text">
      <style:text-properties fo:color="#1f4e79" loext:opacity="100%" style:font-name="Arial1" fo:font-size="16pt" fo:font-weight="bold" style:font-size-asian="16pt" style:font-weight-asian="bold" style:font-name-complex="Arial2" style:font-size-complex="16pt" style:font-weight-complex="bold"/>
    </style:style>
    <style:style style:name="T5" style:family="text">
      <style:text-properties fo:color="#1f4e79" loext:opacity="100%" style:font-name="Arial1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6" style:family="text">
      <style:text-properties fo:color="#1f4e79" loext:opacity="100%" style:font-name="Arial1" fo:font-size="10.5pt" fo:font-weight="bold" style:font-size-asian="10.5pt" style:font-weight-asian="bold" style:font-name-complex="Arial2" style:font-size-complex="10.5pt" style:font-weight-complex="bold"/>
    </style:style>
    <style:style style:name="T7" style:family="text">
      <style:text-properties fo:color="#1f4e79" loext:opacity="100%"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8" style:family="text">
      <style:text-properties fo:color="#1f4e79" loext:opacity="100%" style:font-name="Arial1" fo:font-size="11pt" fo:font-weight="bold" style:font-size-asian="11pt" style:font-weight-asian="bold" style:font-name-complex="Arial2" style:font-size-complex="11pt" style:font-weight-complex="bold"/>
    </style:style>
    <style:style style:name="T9" style:family="text">
      <style:text-properties fo:color="#1f4e79" loext:opacity="100%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10" style:family="text">
      <style:text-properties fo:color="#1f4e79" loext:opacity="100%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11" style:family="text">
      <style:text-properties fo:color="#1f4e79" loext:opacity="100%" fo:font-size="16pt" fo:font-weight="bold" style:font-size-asian="16pt" style:font-weight-asian="bold" style:font-name-complex="Arial2" style:font-size-complex="16pt" style:font-weight-complex="bold"/>
    </style:style>
    <style:style style:name="T12" style:family="text">
      <style:text-properties fo:color="#1f4e79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3" style:family="text">
      <style:text-properties fo:color="#1f4e79" loext:opacity="100%" fo:font-size="10.5pt" fo:font-weight="bold" style:font-size-asian="10.5pt" style:font-weight-asian="bold" style:font-name-complex="Arial2" style:font-size-complex="10.5pt" style:font-weight-complex="bold"/>
    </style:style>
    <style:style style:name="T14" style:family="text">
      <style:text-properties fo:color="#1f4e79" loext:opacity="100%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15" style:family="text">
      <style:text-properties fo:color="#2e75b6" loext:opacity="100%" style:font-name="Arial1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T16" style:family="text">
      <style:text-properties fo:color="#2e75b6" loext:opacity="100%" style:font-name="Arial1" fo:font-size="11pt" fo:font-style="italic" style:font-size-asian="11pt" style:font-style-asian="italic" style:font-name-complex="Arial2" style:font-size-complex="11pt" style:font-style-complex="italic"/>
    </style:style>
    <style:style style:name="T17" style:family="text">
      <style:text-properties fo:color="#2e75b6" loext:opacity="100%" style:font-name="Arial1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18" style:family="text">
      <style:text-properties fo:color="#2e75b6" loext:opacity="100%" style:font-name="Arial1" fo:font-size="13pt" fo:font-weight="bold" style:font-size-asian="13pt" style:font-weight-asian="bold" style:font-name-complex="Arial2" style:font-size-complex="13pt" style:font-weight-complex="bold"/>
    </style:style>
    <style:style style:name="T19" style:family="text">
      <style:text-properties fo:color="#2e75b6" loext:opacity="100%" style:font-name="Arial1" fo:font-size="13pt" fo:font-weight="bold" fo:background-color="#ffd740" loext:char-shading-value="0" style:font-size-asian="13pt" style:font-weight-asian="bold" style:font-name-complex="Arial2" style:font-size-complex="13pt" style:font-weight-complex="bold"/>
    </style:style>
    <style:style style:name="T20" style:family="text">
      <style:text-properties fo:color="#2e75b6" loext:opacity="100%" style:font-name="Arial1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T21" style:family="text">
      <style:text-properties fo:color="#2e75b6" loext:opacity="100%" style:font-name="Arial1" fo:font-size="15pt" fo:font-weight="bold" style:font-size-asian="15pt" style:font-weight-asian="bold" style:font-name-complex="Arial2" style:font-size-complex="15pt" style:font-weight-complex="bold"/>
    </style:style>
    <style:style style:name="T22" style:family="text">
      <style:text-properties fo:color="#2e75b6" loext:opacity="100%" style:font-name="Arial1" fo:font-size="15pt" fo:font-weight="bold" fo:background-color="#ffd740" loext:char-shading-value="0" style:font-size-asian="15pt" style:font-weight-asian="bold" style:font-name-complex="Arial2" style:font-size-complex="15pt" style:font-weight-complex="bold"/>
    </style:style>
    <style:style style:name="T23" style:family="text">
      <style:text-properties fo:color="#2e75b6" loext:opacity="100%" style:font-name="Arial1" fo:font-size="15pt" fo:font-weight="bold" fo:background-color="#ffd740" loext:char-shading-value="0" style:font-name-asian="Arial2" style:font-size-asian="15pt" style:font-weight-asian="bold" style:font-name-complex="Arial2" style:font-size-complex="15pt" style:font-weight-complex="bold"/>
    </style:style>
    <style:style style:name="T24" style:family="text">
      <style:text-properties fo:color="#2e75b6" loext:opacity="100%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T25" style:family="text">
      <style:text-properties fo:color="#2e75b6" loext:opacity="100%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26" style:family="text">
      <style:text-properties fo:color="#2e75b6" loext:opacity="100%" fo:font-size="13pt" fo:font-weight="bold" style:font-size-asian="13pt" style:font-weight-asian="bold" style:font-name-complex="Arial2" style:font-size-complex="13pt" style:font-weight-complex="bold"/>
    </style:style>
    <style:style style:name="T27" style:family="text">
      <style:text-properties fo:color="#595959" loext:opacity="100%" style:font-name="Arial1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28" style:family="text">
      <style:text-properties fo:color="#595959" loext:opacity="100%" style:font-name="Arial1" fo:font-size="11pt" fo:font-style="normal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29" style:family="text">
      <style:text-properties fo:color="#595959" loext:opacity="100%" style:font-name="Arial1" fo:font-size="11pt" style:font-name-asian="Arial2" style:font-size-asian="11pt" style:font-name-complex="Arial2" style:font-size-complex="11pt"/>
    </style:style>
    <style:style style:name="T30" style:family="text">
      <style:text-properties fo:color="#595959" loext:opacity="100%" style:font-name="Arial1" fo:font-size="11pt" style:font-size-asian="11pt" style:font-name-complex="Arial2" style:font-size-complex="11pt"/>
    </style:style>
    <style:style style:name="T31" style:family="text">
      <style:text-properties fo:color="#595959" loext:opacity="100%" style:font-name="Arial1" fo:font-size="11pt" fo:font-weight="bold" style:font-size-asian="11pt" style:font-weight-asian="bold" style:font-name-complex="Arial2" style:font-size-complex="11pt" style:font-weight-complex="bold"/>
    </style:style>
    <style:style style:name="T32" style:family="text">
      <style:text-properties fo:color="#595959" loext:opacity="100%" style:font-name="Arial1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33" style:family="text">
      <style:text-properties fo:color="#595959" loext:opacity="100%" style:font-name="Arial1" fo:font-size="10.5pt" fo:font-weight="normal" style:font-name-asian="Arial2" style:font-size-asian="10.5pt" style:font-weight-asian="normal" style:font-name-complex="Arial2" style:font-size-complex="10.5pt" style:font-weight-complex="normal"/>
    </style:style>
    <style:style style:name="T34" style:family="text">
      <style:text-properties fo:color="#595959" loext:opacity="100%" style:font-name="Arial1" fo:font-size="10.5pt" fo:font-weight="normal" style:font-size-asian="10.5pt" style:font-weight-asian="normal" style:font-name-complex="Arial2" style:font-size-complex="10.5pt" style:font-weight-complex="normal"/>
    </style:style>
    <style:style style:name="T35" style:family="text">
      <style:text-properties fo:color="#595959" loext:opacity="100%" style:font-name="Arial1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36" style:family="text">
      <style:text-properties fo:color="#595959" loext:opacity="100%" style:font-name="Arial1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37" style:family="text">
      <style:text-properties fo:color="#595959" loext:opacity="100%" style:font-name="Arial1" fo:font-size="10.5pt" fo:font-weight="bold" fo:background-color="#76ff03" loext:char-shading-value="0" style:font-size-asian="10.5pt" style:font-weight-asian="bold" style:font-name-complex="Arial2" style:font-size-complex="10.5pt" style:font-weight-complex="bold"/>
    </style:style>
    <style:style style:name="T38" style:family="text">
      <style:text-properties fo:color="#595959" loext:opacity="100%" style:font-name="Arial1" fo:font-size="10.5pt" fo:font-weight="bold" fo:background-color="#ff1744" loext:char-shading-value="0" style:font-size-asian="10.5pt" style:font-weight-asian="bold" style:font-name-complex="Arial2" style:font-size-complex="10.5pt" style:font-weight-complex="bold"/>
    </style:style>
    <style:style style:name="T39" style:family="text">
      <style:text-properties fo:color="#595959" loext:opacity="100%" style:font-name="Arial1" fo:font-size="10.5pt" fo:font-weight="bold" fo:background-color="#18ffff" loext:char-shading-value="0" style:font-size-asian="10.5pt" style:font-weight-asian="bold" style:font-name-complex="Arial2" style:font-size-complex="10.5pt" style:font-weight-complex="bold"/>
    </style:style>
    <style:style style:name="T40" style:family="text">
      <style:text-properties fo:color="#595959" loext:opacity="100%" style:font-name="Arial1" fo:font-size="10.5pt" style:font-name-asian="Arial2" style:font-size-asian="10.5pt" style:font-name-complex="Arial2" style:font-size-complex="10.5pt"/>
    </style:style>
    <style:style style:name="T41" style:family="text">
      <style:text-properties fo:color="#595959" loext:opacity="100%" style:font-name="Arial1" fo:font-size="10.5pt" style:font-size-asian="10.5pt" style:font-name-complex="Arial2" style:font-size-complex="10.5pt"/>
    </style:style>
    <style:style style:name="T42" style:family="text">
      <style:text-properties fo:color="#595959" loext:opacity="100%" style:font-name="Arial1" fo:font-size="10.5pt" fo:background-color="#4a148c" loext:char-shading-value="0" style:font-size-asian="10.5pt" style:font-name-complex="Arial2" style:font-size-complex="10.5pt"/>
    </style:style>
    <style:style style:name="T43" style:family="text">
      <style:text-properties fo:color="#595959" loext:opacity="100%" style:font-name="Arial1" fo:font-size="10.5pt" fo:background-color="#4a148c" loext:char-shading-value="0" style:font-size-asian="10.5pt" style:font-name-complex="Arial2" style:font-size-complex="10.5pt"/>
    </style:style>
    <style:style style:name="T44" style:family="text">
      <style:text-properties fo:color="#595959" loext:opacity="100%" style:font-name="Arial1" fo:font-size="10.5pt" fo:background-color="#311b92" loext:char-shading-value="0" style:font-size-asian="10.5pt" style:font-name-complex="Arial2" style:font-size-complex="10.5pt"/>
    </style:style>
    <style:style style:name="T45" style:family="text">
      <style:text-properties fo:color="#595959" loext:opacity="100%" style:font-name="Arial1" fo:font-size="10.5pt" fo:background-color="#311b92" loext:char-shading-value="0" style:font-size-asian="10.5pt" style:font-name-complex="Arial2" style:font-size-complex="10.5pt"/>
    </style:style>
    <style:style style:name="T46" style:family="text">
      <style:text-properties fo:color="#595959" loext:opacity="100%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47" style:family="text">
      <style:text-properties fo:color="#595959" loext:opacity="100%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48" style:family="text">
      <style:text-properties fo:color="#595959" loext:opacity="100%" fo:font-size="11pt" fo:font-weight="bold" style:font-size-asian="11pt" style:font-weight-asian="bold" style:font-name-complex="Arial2" style:font-size-complex="11pt" style:font-weight-complex="bold"/>
    </style:style>
    <style:style style:name="T49" style:family="text">
      <style:text-properties fo:color="#595959" loext:opacity="100%" fo:font-size="11pt" fo:font-weight="bold" fo:background-color="#76ff03" loext:char-shading-value="0" style:font-size-asian="11pt" style:font-weight-asian="bold" style:font-name-complex="Arial2" style:font-size-complex="11pt" style:font-weight-complex="bold"/>
    </style:style>
    <style:style style:name="T50" style:family="text">
      <style:text-properties fo:color="#595959" loext:opacity="100%" fo:font-size="11pt" style:font-size-asian="11pt" style:font-name-complex="Arial2" style:font-size-complex="11pt"/>
    </style:style>
    <style:style style:name="T51" style:family="text">
      <style:text-properties fo:color="#595959" loext:opacity="100%" fo:font-size="10.5pt" style:font-name-asian="Arial2" style:font-size-asian="10.5pt" style:font-name-complex="Arial2" style:font-size-complex="10.5pt"/>
    </style:style>
    <style:style style:name="T52" style:family="text">
      <style:text-properties fo:color="#595959" loext:opacity="100%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53" style:family="text">
      <style:text-properties fo:color="#595959" loext:opacity="100%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54" style:family="text">
      <style:text-properties fo:color="#595959" loext:opacity="100%" fo:font-size="10.5pt" fo:font-weight="bold" fo:background-color="#76ff03" loext:char-shading-value="0" style:font-name-asian="Arial2" style:font-size-asian="10.5pt" style:font-weight-asian="bold" style:font-name-complex="Arial2" style:font-size-complex="10.5pt" style:font-weight-complex="bold"/>
    </style:style>
    <style:style style:name="T55" style:family="text">
      <style:text-properties fo:color="#595959" loext:opacity="100%" fo:font-size="10.5pt" fo:font-weight="bold" fo:background-color="#ffd740" loext:char-shading-value="0" style:font-name-asian="Arial2" style:font-size-asian="10.5pt" style:font-weight-asian="bold" style:font-name-complex="Arial2" style:font-size-complex="10.5pt" style:font-weight-complex="bold"/>
    </style:style>
    <style:style style:name="T56" style:family="text">
      <style:text-properties fo:color="#595959" loext:opacity="100%" fo:font-size="10.5pt" fo:font-weight="bold" fo:background-color="#ffd740" loext:char-shading-value="0" style:font-size-asian="10.5pt" style:font-weight-asian="bold" style:font-name-complex="Arial2" style:font-size-complex="10.5pt" style:font-weight-complex="bold"/>
    </style:style>
    <style:style style:name="T57" style:family="text">
      <style:text-properties fo:color="#595959" loext:opacity="100%" fo:font-size="10.5pt" fo:font-weight="normal" style:font-name-asian="Arial2" style:font-size-asian="10.5pt" style:font-weight-asian="normal" style:font-name-complex="Arial2" style:font-size-complex="10.5pt" style:font-weight-complex="normal"/>
    </style:style>
    <style:style style:name="T58" style:family="text">
      <style:text-properties fo:color="#595959" loext:opacity="100%" fo:font-size="10.5pt" style:font-size-asian="10.5pt" style:font-name-complex="Arial2" style:font-size-complex="10.5pt"/>
    </style:style>
    <style:style style:name="T59" style:family="text">
      <style:text-properties fo:color="#595959" loext:opacity="100%" fo:font-size="10.5pt" fo:background-color="#1b5e20" loext:char-shading-value="0" style:font-name-asian="Arial2" style:font-size-asian="10.5pt" style:font-name-complex="Arial2" style:font-size-complex="10.5pt"/>
    </style:style>
    <style:style style:name="T60" style:family="text">
      <style:text-properties fo:color="#595959" loext:opacity="100%" fo:font-size="10.5pt" fo:background-color="#1b5e20" loext:char-shading-value="0" style:font-name-asian="Arial2" style:font-size-asian="10.5pt" style:font-name-complex="Arial2" style:font-size-complex="10.5pt"/>
    </style:style>
    <style:style style:name="T61" style:family="text">
      <style:text-properties fo:color="#595959" loext:opacity="100%" fo:font-size="10.5pt" fo:background-color="#0d47a1" loext:char-shading-value="0" style:font-name-asian="Arial2" style:font-size-asian="10.5pt" style:font-name-complex="Arial2" style:font-size-complex="10.5pt"/>
    </style:style>
    <style:style style:name="T62" style:family="text">
      <style:text-properties fo:color="#595959" loext:opacity="100%" fo:font-size="10.5pt" fo:background-color="#0d47a1" loext:char-shading-value="0" style:font-name-asian="Arial2" style:font-size-asian="10.5pt" style:font-name-complex="Arial2" style:font-size-complex="10.5pt"/>
    </style:style>
    <style:style style:name="T63" style:family="text">
      <style:text-properties fo:color="#595959" loext:opacity="100%" fo:font-size="10.5pt" fo:background-color="#e65100" loext:char-shading-value="0" style:font-name-asian="Arial2" style:font-size-asian="10.5pt" style:font-name-complex="Arial2" style:font-size-complex="10.5pt"/>
    </style:style>
    <style:style style:name="T64" style:family="text">
      <style:text-properties fo:color="#595959" loext:opacity="100%" fo:font-size="10.5pt" fo:background-color="#e65100" loext:char-shading-value="0" style:font-name-asian="Arial2" style:font-size-asian="10.5pt" style:font-name-complex="Arial2" style:font-size-complex="10.5pt"/>
    </style:style>
    <style:style style:name="T65" style:family="text">
      <style:text-properties fo:color="#595959" loext:opacity="100%" fo:font-size="10.5pt" fo:background-color="#4a148c" loext:char-shading-value="0" style:font-name-asian="Arial2" style:font-size-asian="10.5pt" style:font-name-complex="Arial2" style:font-size-complex="10.5pt"/>
    </style:style>
    <style:style style:name="T66" style:family="text">
      <style:text-properties fo:color="#595959" loext:opacity="100%" fo:font-size="10.5pt" fo:background-color="#4a148c" loext:char-shading-value="0" style:font-name-asian="Arial2" style:font-size-asian="10.5pt" style:font-name-complex="Arial2" style:font-size-complex="10.5pt"/>
    </style:style>
    <style:style style:name="T67" style:family="text">
      <style:text-properties fo:color="#595959" loext:opacity="100%" fo:font-size="10.5pt" fo:background-color="#311b92" loext:char-shading-value="0" style:font-name-asian="Arial2" style:font-size-asian="10.5pt" style:font-name-complex="Arial2" style:font-size-complex="10.5pt"/>
    </style:style>
    <style:style style:name="T68" style:family="text">
      <style:text-properties fo:color="#595959" loext:opacity="100%" fo:font-size="10.5pt" fo:background-color="#311b92" loext:char-shading-value="0" style:font-name-asian="Arial2" style:font-size-asian="10.5pt" style:font-name-complex="Arial2" style:font-size-complex="10.5pt"/>
    </style:style>
    <style:style style:name="T69" style:family="text">
      <style:text-properties fo:color="#00e676" loext:opacity="100%" style:font-name="Arial1" fo:font-size="10.5pt" fo:font-weight="bold" fo:background-color="#5d4037" loext:char-shading-value="0" style:font-size-asian="10.5pt" style:font-weight-asian="bold" style:font-name-complex="Arial2" style:font-size-complex="10.5pt" style:font-weight-complex="bold"/>
    </style:style>
    <style:style style:name="T70" style:family="text">
      <style:text-properties fo:color="#00e676" loext:opacity="100%" style:font-name="Arial1" fo:font-size="28pt" fo:font-weight="bold" fo:background-color="#d500f9" loext:char-shading-value="0" style:font-size-asian="28pt" style:font-weight-asian="bold" style:font-name-complex="Arial2" style:font-size-complex="28pt" style:font-weight-complex="bold"/>
    </style:style>
    <style:style style:name="T71" style:family="text">
      <style:text-properties fo:color="#00e676" loext:opacity="100%" style:font-name="Arial1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72" style:family="text">
      <style:text-properties fo:color="#00e676" loext:opacity="100%" style:font-name="Arial1" fo:font-size="12pt" fo:font-weight="bold" fo:background-color="#000000" loext:char-shading-value="0" style:font-size-asian="12pt" style:font-weight-asian="bold" style:font-name-complex="Arial2" style:font-size-complex="12pt" style:font-weight-complex="bold"/>
    </style:style>
    <style:style style:name="T73" style:family="text">
      <style:text-properties fo:color="#00e676" loext:opacity="100%" style:font-name="Arial1" fo:font-size="12pt" fo:font-weight="bold" fo:background-color="#000000" loext:char-shading-value="0" style:font-name-asian="Arial2" style:font-size-asian="12pt" style:font-weight-asian="bold" style:font-name-complex="Arial2" style:font-size-complex="12pt" style:font-weight-complex="bold"/>
    </style:style>
    <style:style style:name="T74" style:family="text">
      <style:text-properties fo:color="#00e676" loext:opacity="100%" fo:font-size="10.5pt" fo:font-weight="bold" fo:background-color="#5d4037" loext:char-shading-value="0" style:font-size-asian="10.5pt" style:font-weight-asian="bold" style:font-name-complex="Arial2" style:font-size-complex="10.5pt" style:font-weight-complex="bold"/>
    </style:style>
    <style:style style:name="T75" style:family="text">
      <style:text-properties fo:color="#00e676" loext:opacity="100%" fo:font-size="10.5pt" fo:font-weight="bold" fo:background-color="#5d4037" loext:char-shading-value="0" style:font-name-asian="Arial2" style:font-size-asian="10.5pt" style:font-weight-asian="bold" style:font-name-complex="Arial2" style:font-size-complex="10.5pt" style:font-weight-complex="bold"/>
    </style:style>
    <style:style style:name="T76" style:family="text">
      <style:text-properties fo:color="#00e676" loext:opacity="100%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77" style:family="text">
      <style:text-properties fo:color="#00e676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78" style:family="text">
      <style:text-properties fo:color="#00e676" loext:opacity="100%" fo:font-size="28pt" fo:font-weight="bold" fo:background-color="#d500f9" loext:char-shading-value="0" style:font-name-asian="Arial2" style:font-size-asian="28pt" style:font-weight-asian="bold" style:font-name-complex="Arial2" style:font-size-complex="28pt" style:font-weight-complex="bold"/>
    </style:style>
    <style:style style:name="T79" style:family="text">
      <style:text-properties fo:color="#00e676" loext:opacity="100%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80" style:family="text">
      <style:text-properties fo:color="#00e676" loext:opacity="100%" style:font-name="Courier New" fo:font-size="9.5pt" fo:font-weight="bold" fo:background-color="#5d4037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81" style:family="text">
      <style:text-properties fo:color="#00e676" loext:opacity="100%" style:font-name="Courier New" fo:font-size="9.5pt" fo:font-weight="bold" fo:background-color="#6d4c41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82" style:family="text">
      <style:text-properties fo:color="#ff5252" loext:opacity="100%" style:font-name="Arial1" fo:font-size="10.5pt" fo:font-weight="bold" fo:background-color="#ffebee" loext:char-shading-value="0" style:font-size-asian="10.5pt" style:font-weight-asian="bold" style:font-name-complex="Arial2" style:font-size-complex="10.5pt" style:font-weight-complex="bold"/>
    </style:style>
    <style:style style:name="T83" style:family="text">
      <style:text-properties fo:color="#ff5252" loext:opacity="100%" style:font-name="Arial1" fo:font-size="12pt" fo:font-weight="bold" fo:background-color="#000000" loext:char-shading-value="0" style:font-size-asian="12pt" style:font-weight-asian="bold" style:font-name-complex="Arial2" style:font-size-complex="12pt" style:font-weight-complex="bold"/>
    </style:style>
    <style:style style:name="T84" style:family="text">
      <style:text-properties fo:color="#ff5252" loext:opacity="100%" style:font-name="Arial1" fo:font-size="12pt" fo:font-weight="bold" fo:background-color="#000000" loext:char-shading-value="0" style:font-name-asian="Arial2" style:font-size-asian="12pt" style:font-weight-asian="bold" style:font-name-complex="Arial2" style:font-size-complex="12pt" style:font-weight-complex="bold"/>
    </style:style>
    <style:style style:name="T85" style:family="text">
      <style:text-properties fo:color="#18ffff" loext:opacity="100%" style:font-name="Arial1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86" style:family="text">
      <style:text-properties fo:color="#18ffff" loext:opacity="100%" style:font-name="Arial1" fo:font-size="10.5pt" fo:font-weight="bold" fo:background-color="#d500f9" loext:char-shading-value="0" style:font-size-asian="10.5pt" style:font-weight-asian="bold" style:font-name-complex="Arial2" style:font-size-complex="10.5pt" style:font-weight-complex="bold"/>
    </style:style>
    <style:style style:name="T87" style:family="text">
      <style:text-properties fo:color="#18ffff" loext:opacity="100%" style:font-name="Arial1" fo:font-size="13pt" fo:font-weight="bold" fo:background-color="#d500f9" loext:char-shading-value="0" style:font-size-asian="13pt" style:font-weight-asian="bold" style:font-name-complex="Arial2" style:font-size-complex="13pt" style:font-weight-complex="bold"/>
    </style:style>
    <style:style style:name="T88" style:family="text">
      <style:text-properties fo:color="#18ffff" loext:opacity="100%" style:font-name="Arial1" fo:font-size="11pt" fo:font-weight="bold" fo:background-color="#d500f9" loext:char-shading-value="0" style:font-size-asian="11pt" style:font-weight-asian="bold" style:font-name-complex="Arial2" style:font-size-complex="11pt" style:font-weight-complex="bold"/>
    </style:style>
    <style:style style:name="T89" style:family="text">
      <style:text-properties fo:color="#18ffff" loext:opacity="100%" style:font-name="Arial1" fo:font-size="12pt" fo:font-weight="bold" fo:background-color="#d500f9" loext:char-shading-value="0" style:font-size-asian="12pt" style:font-weight-asian="bold" style:font-name-complex="Arial2" style:font-size-complex="12pt" style:font-weight-complex="bold"/>
    </style:style>
    <style:style style:name="T90" style:family="text">
      <style:text-properties fo:color="#18ffff" loext:opacity="100%" style:font-name="Arial1" fo:font-size="12pt" fo:font-weight="bold" fo:background-color="#d500f9" loext:char-shading-value="0" style:font-name-asian="Arial2" style:font-size-asian="12pt" style:font-weight-asian="bold" style:font-name-complex="Arial2" style:font-size-complex="12pt" style:font-weight-complex="bold"/>
    </style:style>
    <style:style style:name="T91" style:family="text">
      <style:text-properties fo:color="#18ffff" loext:opacity="100%" fo:font-size="10.5pt" fo:font-weight="bold" fo:background-color="#d500f9" loext:char-shading-value="0" style:font-name-asian="Arial2" style:font-size-asian="10.5pt" style:font-weight-asian="bold" style:font-name-complex="Arial2" style:font-size-complex="10.5pt" style:font-weight-complex="bold"/>
    </style:style>
    <style:style style:name="T92" style:family="text">
      <style:text-properties fo:color="#18ffff" loext:opacity="100%" fo:font-size="10.5pt" fo:font-weight="bold" fo:background-color="#d500f9" loext:char-shading-value="0" style:font-size-asian="10.5pt" style:font-weight-asian="bold" style:font-name-complex="Arial2" style:font-size-complex="10.5pt" style:font-weight-complex="bold"/>
    </style:style>
    <style:style style:name="T93" style:family="text">
      <style:text-properties fo:color="#18ffff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94" style:family="text">
      <style:text-properties fo:color="#18ffff" loext:opacity="100%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95" style:family="text">
      <style:text-properties fo:color="#18ffff" loext:opacity="100%" fo:font-size="10.5pt" fo:font-weight="bold" fo:background-color="#0d47a1" loext:char-shading-value="0" style:font-name-asian="Arial2" style:font-size-asian="10.5pt" style:font-weight-asian="bold" style:font-name-complex="Arial2" style:font-size-complex="10.5pt" style:font-weight-complex="bold"/>
    </style:style>
    <style:style style:name="T96" style:family="text">
      <style:text-properties fo:color="#18ffff" loext:opacity="100%" fo:font-size="10.5pt" fo:background-color="#0d47a1" loext:char-shading-value="0" style:font-name-asian="Arial2" style:font-size-asian="10.5pt" style:font-name-complex="Arial2" style:font-size-complex="10.5pt"/>
    </style:style>
    <style:style style:name="T97" style:family="text">
      <style:text-properties fo:color="#18ffff" loext:opacity="100%" fo:font-size="11pt" fo:font-weight="bold" fo:background-color="#d500f9" loext:char-shading-value="0" style:font-size-asian="11pt" style:font-weight-asian="bold" style:font-name-complex="Arial2" style:font-size-complex="11pt" style:font-weight-complex="bold"/>
    </style:style>
    <style:style style:name="T98" style:family="text">
      <style:text-properties fo:color="#18ffff" loext:opacity="100%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99" style:family="text">
      <style:text-properties fo:color="#18ffff" loext:opacity="100%" fo:font-size="13pt" fo:font-weight="bold" fo:background-color="#d500f9" loext:char-shading-value="0" style:font-name-asian="Arial2" style:font-size-asian="13pt" style:font-weight-asian="bold" style:font-name-complex="Arial2" style:font-size-complex="13pt" style:font-weight-complex="bold"/>
    </style:style>
    <style:style style:name="T100" style:family="text">
      <style:text-properties fo:color="#18ffff" loext:opacity="100%" fo:font-size="13pt" fo:font-weight="bold" fo:background-color="#d500f9" loext:char-shading-value="0" style:font-size-asian="13pt" style:font-weight-asian="bold" style:font-name-complex="Arial2" style:font-size-complex="13pt" style:font-weight-complex="bold"/>
    </style:style>
    <style:style style:name="T101" style:family="text">
      <style:text-properties fo:color="#76ff03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02" style:family="text">
      <style:text-properties fo:color="#76ff03" loext:opacity="100%" fo:font-size="10.5pt" fo:font-weight="bold" fo:background-color="#5d4037" loext:char-shading-value="0" style:font-name-asian="Arial2" style:font-size-asian="10.5pt" style:font-weight-asian="bold" style:font-name-complex="Arial2" style:font-size-complex="10.5pt" style:font-weight-complex="bold"/>
    </style:style>
    <style:style style:name="T103" style:family="text">
      <style:text-properties fo:color="#76ff03" loext:opacity="100%" fo:font-size="10.5pt" fo:font-weight="bold" fo:background-color="#5d4037" loext:char-shading-value="0" style:font-size-asian="10.5pt" style:font-weight-asian="bold" style:font-name-complex="Arial2" style:font-size-complex="10.5pt" style:font-weight-complex="bold"/>
    </style:style>
    <style:style style:name="T104" style:family="text">
      <style:text-properties fo:color="#76ff03" loext:opacity="100%" fo:font-size="10.5pt" fo:font-weight="bold" fo:background-color="#1b5e20" loext:char-shading-value="0" style:font-name-asian="Arial2" style:font-size-asian="10.5pt" style:font-weight-asian="bold" style:font-name-complex="Arial2" style:font-size-complex="10.5pt" style:font-weight-complex="bold"/>
    </style:style>
    <style:style style:name="T105" style:family="text">
      <style:text-properties fo:color="#76ff03" loext:opacity="100%" fo:font-size="10.5pt" fo:background-color="#1b5e20" loext:char-shading-value="0" style:font-name-asian="Arial2" style:font-size-asian="10.5pt" style:font-name-complex="Arial2" style:font-size-complex="10.5pt"/>
    </style:style>
    <style:style style:name="T106" style:family="text">
      <style:text-properties fo:color="#76ff03" loext:opacity="100%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107" style:family="text">
      <style:text-properties fo:color="#76ff03" loext:opacity="100%" fo:font-size="11pt" fo:font-weight="bold" fo:background-color="#5d4037" loext:char-shading-value="0" style:font-name-asian="Arial2" style:font-size-asian="11pt" style:font-weight-asian="bold" style:font-name-complex="Arial2" style:font-size-complex="11pt" style:font-weight-complex="bold"/>
    </style:style>
    <style:style style:name="T108" style:family="text">
      <style:text-properties fo:color="#76ff03" loext:opacity="100%" style:font-name="Arial1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109" style:family="text">
      <style:text-properties fo:color="#76ff03" loext:opacity="100%" style:font-name="Arial1" fo:font-size="12pt" fo:font-weight="bold" fo:background-color="#6d4c41" loext:char-shading-value="0" style:font-size-asian="12pt" style:font-weight-asian="bold" style:font-name-complex="Arial2" style:font-size-complex="12pt" style:font-weight-complex="bold"/>
    </style:style>
    <style:style style:name="T110" style:family="text">
      <style:text-properties fo:color="#ff1744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11" style:family="text">
      <style:text-properties fo:color="#ff1744" loext:opacity="100%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112" style:family="text">
      <style:text-properties fo:color="#ff1744" loext:opacity="100%" style:font-name="Arial1" fo:font-size="12pt" fo:font-weight="bold" fo:background-color="#ffff00" loext:char-shading-value="0" style:font-size-asian="12pt" style:font-weight-asian="bold" style:font-name-complex="Arial2" style:font-size-complex="12pt" style:font-weight-complex="bold"/>
    </style:style>
    <style:style style:name="T113" style:family="text">
      <style:text-properties fo:color="#ff1744" loext:opacity="100%" style:font-name="Arial1" fo:font-size="12pt" fo:font-weight="bold" fo:background-color="#ffcdd2" loext:char-shading-value="0" style:font-name-asian="Arial2" style:font-size-asian="12pt" style:font-weight-asian="bold" style:font-name-complex="Arial2" style:font-size-complex="12pt" style:font-weight-complex="bold"/>
    </style:style>
    <style:style style:name="T114" style:family="text">
      <style:text-properties fo:color="#ff1744" loext:opacity="100%" style:font-name="Arial1" fo:font-size="12pt" fo:font-weight="bold" fo:background-color="#ffebee" loext:char-shading-value="0" style:font-name-asian="Arial2" style:font-size-asian="12pt" style:font-weight-asian="bold" style:font-name-complex="Arial2" style:font-size-complex="12pt" style:font-weight-complex="bold"/>
    </style:style>
    <style:style style:name="T115" style:family="text">
      <style:text-properties fo:color="#ff1744" loext:opacity="100%" style:font-name="Arial1" fo:font-size="12pt" fo:font-weight="bold" fo:background-color="#ffebee" loext:char-shading-value="0" style:font-size-asian="12pt" style:font-weight-asian="bold" style:font-name-complex="Arial2" style:font-size-complex="12pt" style:font-weight-complex="bold"/>
    </style:style>
    <style:style style:name="T116" style:family="text">
      <style:text-properties fo:color="#ff1744" loext:opacity="100%" style:font-name="Arial1" fo:font-size="12pt" fo:font-weight="bold" fo:background-color="#6d4c41" loext:char-shading-value="0" style:font-name-asian="Arial2" style:font-size-asian="12pt" style:font-weight-asian="bold" style:font-name-complex="Arial2" style:font-size-complex="12pt" style:font-weight-complex="bold"/>
    </style:style>
    <style:style style:name="T117" style:family="text">
      <style:text-properties fo:color="#64ffda" loext:opacity="100%" fo:font-size="10.5pt" fo:font-weight="bold" fo:background-color="#6d4c41" loext:char-shading-value="0" style:font-name-asian="Arial2" style:font-size-asian="10.5pt" style:font-weight-asian="bold" style:font-name-complex="Arial2" style:font-size-complex="10.5pt" style:font-weight-complex="bold"/>
    </style:style>
    <style:style style:name="T118" style:family="text">
      <style:text-properties fo:color="#ffd740" loext:opacity="100%" fo:font-size="11pt" fo:font-style="normal" fo:font-weight="bold" fo:background-color="#000000" loext:char-shading-value="0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T119" style:family="text">
      <style:text-properties fo:color="#ffd740" loext:opacity="100%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120" style:family="text">
      <style:text-properties fo:color="#ffd740" loext:opacity="100%" style:font-name="Arial1" fo:font-size="11pt" fo:font-style="normal" fo:font-weight="bold" fo:background-color="#000000" loext:char-shading-value="0" style:font-size-asian="11pt" style:font-style-asian="normal" style:font-weight-asian="bold" style:font-name-complex="Arial2" style:font-size-complex="11pt" style:font-style-complex="normal" style:font-weight-complex="bold"/>
    </style:style>
    <style:style style:name="T121" style:family="text">
      <style:text-properties fo:color="#ffd740" loext:opacity="100%" style:font-name="Arial1" fo:font-size="11pt" fo:font-weight="bold" fo:background-color="#3d5afe" loext:char-shading-value="0" style:font-size-asian="11pt" style:font-weight-asian="bold" style:font-name-complex="Arial2" style:font-size-complex="11pt" style:font-weight-complex="bold"/>
    </style:style>
    <style:style style:name="T122" style:family="text">
      <style:text-properties fo:color="#ffd740" loext:opacity="100%" style:font-name="Arial1" fo:font-size="10.5pt" fo:font-weight="bold" fo:background-color="#3d5afe" loext:char-shading-value="0" style:font-size-asian="10.5pt" style:font-weight-asian="bold" style:font-name-complex="Arial2" style:font-size-complex="10.5pt" style:font-weight-complex="bold"/>
    </style:style>
    <style:style style:name="T123" style:family="text">
      <style:text-properties fo:color="#ffd740" loext:opacity="100%" style:font-name="Arial1" fo:font-size="12pt" fo:font-weight="bold" fo:background-color="#3d5afe" loext:char-shading-value="0" style:font-size-asian="12pt" style:font-weight-asian="bold" style:font-name-complex="Arial2" style:font-size-complex="12pt" style:font-weight-complex="bold"/>
    </style:style>
    <style:style style:name="T124" style:family="text">
      <style:text-properties fo:color="#ffd740" loext:opacity="100%" style:font-name="Arial1" fo:font-size="12pt" fo:font-weight="bold" fo:background-color="#3d5afe" loext:char-shading-value="0" style:font-name-asian="Arial2" style:font-size-asian="12pt" style:font-weight-asian="bold" style:font-name-complex="Arial2" style:font-size-complex="12pt" style:font-weight-complex="bold"/>
    </style:style>
    <style:style style:name="T125" style:family="text">
      <style:text-properties fo:color="#ffd740" loext:opacity="100%" style:font-name="Arial1" fo:font-size="12pt" fo:font-weight="bold" fo:background-color="#000000" loext:char-shading-value="0" style:font-name-asian="Arial2" style:font-size-asian="12pt" style:font-weight-asian="bold" style:font-name-complex="Arial2" style:font-size-complex="12pt" style:font-weight-complex="bold"/>
    </style:style>
    <style:style style:name="T126" style:family="text">
      <style:text-properties fo:color="#ffd740" loext:opacity="100%" style:font-name="Arial1" fo:font-size="12pt" fo:font-weight="bold" fo:background-color="#000000" loext:char-shading-value="0" style:font-size-asian="12pt" style:font-weight-asian="bold" style:font-name-complex="Arial2" style:font-size-complex="12pt" style:font-weight-complex="bold"/>
    </style:style>
    <style:style style:name="T127" style:family="text">
      <style:text-properties fo:color="#ffd740" loext:opacity="100%" fo:font-size="10.5pt" fo:font-weight="bold" fo:background-color="#3d5afe" loext:char-shading-value="0" style:font-name-asian="Arial2" style:font-size-asian="10.5pt" style:font-weight-asian="bold" style:font-name-complex="Arial2" style:font-size-complex="10.5pt" style:font-weight-complex="bold"/>
    </style:style>
    <style:style style:name="T128" style:family="text">
      <style:text-properties fo:color="#ffd740" loext:opacity="100%" fo:font-size="10.5pt" fo:font-weight="bold" fo:background-color="#3d5afe" loext:char-shading-value="0" style:font-size-asian="10.5pt" style:font-weight-asian="bold" style:font-name-complex="Arial2" style:font-size-complex="10.5pt" style:font-weight-complex="bold"/>
    </style:style>
    <style:style style:name="T129" style:family="text">
      <style:text-properties fo:color="#ffd740" loext:opacity="100%" fo:font-size="10.5pt" fo:font-weight="bold" fo:background-color="#651fff" loext:char-shading-value="0" style:font-name-asian="Arial2" style:font-size-asian="10.5pt" style:font-weight-asian="bold" style:font-name-complex="Arial2" style:font-size-complex="10.5pt" style:font-weight-complex="bold"/>
    </style:style>
    <style:style style:name="T130" style:family="text">
      <style:text-properties fo:color="#ffd740" loext:opacity="100%" fo:font-size="10.5pt" fo:font-weight="bold" fo:background-color="#651fff" loext:char-shading-value="0" style:font-size-asian="10.5pt" style:font-weight-asian="bold" style:font-name-complex="Arial2" style:font-size-complex="10.5pt" style:font-weight-complex="bold"/>
    </style:style>
    <style:style style:name="T131" style:family="text">
      <style:text-properties fo:color="#ffd740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32" style:family="text">
      <style:text-properties fo:color="#ffd740" loext:opacity="100%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133" style:family="text">
      <style:text-properties fo:color="#ffd740" loext:opacity="100%" style:font-name="Courier New" fo:font-size="9.5pt" fo:font-weight="bold" fo:background-color="#3d5afe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34" style:family="text">
      <style:text-properties fo:color="#ff4081" loext:opacity="100%" style:font-name="Arial1" fo:font-size="11pt" fo:font-style="normal" fo:font-weight="bold" fo:background-color="#fce4ec" loext:char-shading-value="0" style:font-size-asian="11pt" style:font-style-asian="normal" style:font-weight-asian="bold" style:font-name-complex="Arial2" style:font-size-complex="11pt" style:font-style-complex="normal" style:font-weight-complex="bold"/>
    </style:style>
    <style:style style:name="T135" style:family="text">
      <style:text-properties fo:color="#ff4081" loext:opacity="100%" style:font-name="Arial1" fo:font-size="12pt" fo:font-weight="bold" fo:background-color="#ffff00" loext:char-shading-value="0" style:font-size-asian="12pt" style:font-weight-asian="bold" style:font-name-complex="Arial2" style:font-size-complex="12pt" style:font-weight-complex="bold"/>
    </style:style>
    <style:style style:name="T136" style:family="text">
      <style:text-properties fo:color="#ff4081" loext:opacity="100%" style:font-name="Arial1" fo:font-size="12pt" fo:font-weight="bold" fo:background-color="#fce4ec" loext:char-shading-value="0" style:font-name-asian="Arial2" style:font-size-asian="12pt" style:font-weight-asian="bold" style:font-name-complex="Arial2" style:font-size-complex="12pt" style:font-weight-complex="bold"/>
    </style:style>
    <style:style style:name="T137" style:family="text">
      <style:text-properties fo:color="#ff4081" loext:opacity="100%" style:font-name="Arial1" fo:font-size="12pt" fo:font-weight="bold" fo:background-color="#fce4ec" loext:char-shading-value="0" style:font-size-asian="12pt" style:font-weight-asian="bold" style:font-name-complex="Arial2" style:font-size-complex="12pt" style:font-weight-complex="bold"/>
    </style:style>
    <style:style style:name="T138" style:family="text">
      <style:text-properties fo:color="#ff4081" loext:opacity="100%" style:font-name="Arial1" fo:font-size="12pt" fo:font-weight="bold" fo:background-color="#6d4c41" loext:char-shading-value="0" style:font-name-asian="Arial2" style:font-size-asian="12pt" style:font-weight-asian="bold" style:font-name-complex="Arial2" style:font-size-complex="12pt" style:font-weight-complex="bold"/>
    </style:style>
    <style:style style:name="T139" style:family="text">
      <style:text-properties fo:color="#ff4081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40" style:family="text">
      <style:text-properties fo:color="#ff4081" loext:opacity="100%" style:font-name="Courier New" fo:font-size="9.5pt" fo:font-weight="bold" fo:background-color="#000000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41" style:family="text">
      <style:text-properties fo:color="#c6ff00" loext:opacity="100%" fo:font-size="10.5pt" fo:font-weight="bold" fo:background-color="#ff4081" loext:char-shading-value="0" style:font-name-asian="Arial2" style:font-size-asian="10.5pt" style:font-weight-asian="bold" style:font-name-complex="Arial2" style:font-size-complex="10.5pt" style:font-weight-complex="bold"/>
    </style:style>
    <style:style style:name="T142" style:family="text">
      <style:text-properties fo:color="#c6ff00" loext:opacity="100%" fo:font-size="10.5pt" fo:font-weight="bold" fo:background-color="#f50057" loext:char-shading-value="0" style:font-name-asian="Arial2" style:font-size-asian="10.5pt" style:font-weight-asian="bold" style:font-name-complex="Arial2" style:font-size-complex="10.5pt" style:font-weight-complex="bold"/>
    </style:style>
    <style:style style:name="T143" style:family="text">
      <style:text-properties fo:color="#c6ff00" loext:opacity="100%" fo:font-size="10.5pt" fo:font-weight="bold" fo:background-color="#f50057" loext:char-shading-value="0" style:font-size-asian="10.5pt" style:font-weight-asian="bold" style:font-name-complex="Arial2" style:font-size-complex="10.5pt" style:font-weight-complex="bold"/>
    </style:style>
    <style:style style:name="T144" style:family="text">
      <style:text-properties fo:color="#c6ff00" loext:opacity="100%" style:font-name="Arial1" fo:font-size="10.5pt" fo:font-weight="bold" fo:background-color="#f50057" loext:char-shading-value="0" style:font-size-asian="10.5pt" style:font-weight-asian="bold" style:font-name-complex="Arial2" style:font-size-complex="10.5pt" style:font-weight-complex="bold"/>
    </style:style>
    <style:style style:name="T145" style:family="text">
      <style:text-properties fo:color="#c6ff00" loext:opacity="100%" style:font-name="Arial1" fo:font-size="11pt" fo:font-weight="bold" fo:background-color="#f50057" loext:char-shading-value="0" style:font-size-asian="11pt" style:font-weight-asian="bold" style:font-name-complex="Arial2" style:font-size-complex="11pt" style:font-weight-complex="bold"/>
    </style:style>
    <style:style style:name="T146" style:family="text">
      <style:text-properties fo:color="#c6ff00" loext:opacity="100%" style:font-name="Arial1" fo:font-size="12pt" fo:font-weight="bold" fo:background-color="#f50057" loext:char-shading-value="0" style:font-size-asian="12pt" style:font-weight-asian="bold" style:font-name-complex="Arial2" style:font-size-complex="12pt" style:font-weight-complex="bold"/>
    </style:style>
    <style:style style:name="T147" style:family="text">
      <style:text-properties fo:color="#c6ff00" loext:opacity="100%" style:font-name="Arial1" fo:font-size="13pt" fo:font-weight="bold" fo:background-color="#f50057" loext:char-shading-value="0" style:font-size-asian="13pt" style:font-weight-asian="bold" style:font-name-complex="Arial2" style:font-size-complex="13pt" style:font-weight-complex="bold"/>
    </style:style>
    <style:style style:name="T148" style:family="text">
      <style:text-properties fo:color="#c6ff00" loext:opacity="100%" fo:font-size="11pt" fo:font-weight="bold" fo:background-color="#f50057" loext:char-shading-value="0" style:font-size-asian="11pt" style:font-weight-asian="bold" style:font-name-complex="Arial2" style:font-size-complex="11pt" style:font-weight-complex="bold"/>
    </style:style>
    <style:style style:name="T149" style:family="text">
      <style:text-properties fo:color="#c6ff00" loext:opacity="100%" style:font-name="Courier New" fo:font-size="9.5pt" fo:font-weight="bold" fo:background-color="#f50057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50" style:family="text">
      <style:text-properties fo:color="#ff9100" loext:opacity="100%" style:font-name="Arial1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151" style:family="text">
      <style:text-properties fo:color="#ff9100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52" style:family="text">
      <style:text-properties fo:color="#ff3d00" loext:opacity="100%" style:font-name="Arial1" fo:font-size="10.5pt" fo:font-weight="bold" fo:background-color="#64ffda" loext:char-shading-value="0" style:font-size-asian="10.5pt" style:font-weight-asian="bold" style:font-name-complex="Arial2" style:font-size-complex="10.5pt" style:font-weight-complex="bold"/>
    </style:style>
    <style:style style:name="T153" style:family="text">
      <style:text-properties fo:color="#ff3d00" loext:opacity="100%" style:font-name="Arial1" fo:font-size="15pt" fo:font-weight="bold" fo:background-color="#64ffda" loext:char-shading-value="0" style:font-size-asian="15pt" style:font-weight-asian="bold" style:font-name-complex="Arial2" style:font-size-complex="15pt" style:font-weight-complex="bold"/>
    </style:style>
    <style:style style:name="T154" style:family="text">
      <style:text-properties fo:color="#ff3d00" loext:opacity="100%" style:font-name="Arial1" fo:font-size="12pt" fo:font-weight="bold" fo:background-color="#64ffda" loext:char-shading-value="0" style:font-size-asian="12pt" style:font-weight-asian="bold" style:font-name-complex="Arial2" style:font-size-complex="12pt" style:font-weight-complex="bold"/>
    </style:style>
    <style:style style:name="T155" style:family="text">
      <style:text-properties fo:color="#ff3d00" loext:opacity="100%" style:font-name="Arial1" fo:font-size="12pt" fo:font-weight="bold" fo:background-color="#64ffda" loext:char-shading-value="0" style:font-name-asian="Arial2" style:font-size-asian="12pt" style:font-weight-asian="bold" style:font-name-complex="Arial2" style:font-size-complex="12pt" style:font-weight-complex="bold"/>
    </style:style>
    <style:style style:name="T156" style:family="text">
      <style:text-properties fo:color="#ff3d00" loext:opacity="100%" fo:font-size="10.5pt" fo:font-weight="bold" fo:background-color="#64ffda" loext:char-shading-value="0" style:font-name-asian="Arial2" style:font-size-asian="10.5pt" style:font-weight-asian="bold" style:font-name-complex="Arial2" style:font-size-complex="10.5pt" style:font-weight-complex="bold"/>
    </style:style>
    <style:style style:name="T157" style:family="text">
      <style:text-properties fo:color="#ff3d00" loext:opacity="100%" fo:font-size="10.5pt" fo:font-weight="bold" fo:background-color="#64ffda" loext:char-shading-value="0" style:font-size-asian="10.5pt" style:font-weight-asian="bold" style:font-name-complex="Arial2" style:font-size-complex="10.5pt" style:font-weight-complex="bold"/>
    </style:style>
    <style:style style:name="T158" style:family="text">
      <style:text-properties fo:color="#ff3d00" loext:opacity="100%" fo:font-size="10.5pt" fo:font-weight="bold" fo:background-color="#00e676" loext:char-shading-value="0" style:font-size-asian="10.5pt" style:font-weight-asian="bold" style:font-name-complex="Arial2" style:font-size-complex="10.5pt" style:font-weight-complex="bold"/>
    </style:style>
    <style:style style:name="T159" style:family="text">
      <style:text-properties fo:color="#ff3d00" loext:opacity="100%" fo:font-size="11pt" fo:font-weight="bold" fo:background-color="#64ffda" loext:char-shading-value="0" style:font-size-asian="11pt" style:font-weight-asian="bold" style:font-name-complex="Arial2" style:font-size-complex="11pt" style:font-weight-complex="bold"/>
    </style:style>
    <style:style style:name="T160" style:family="text">
      <style:text-properties fo:color="#ff3d00" loext:opacity="100%" style:font-name="Courier New" fo:font-size="9.5pt" fo:font-weight="bold" fo:background-color="#fbe9e7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61" style:family="text">
      <style:text-properties fo:color="#ff3d00" loext:opacity="100%" style:font-name="Courier New" fo:font-size="9.5pt" fo:font-weight="bold" fo:background-color="#64ffda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62" style:family="text">
      <style:text-properties fo:color="#ffff00" loext:opacity="100%" style:font-name="Arial1" fo:font-size="10.5pt" fo:font-weight="bold" fo:background-color="#f50057" loext:char-shading-value="0" style:font-size-asian="10.5pt" style:font-weight-asian="bold" style:font-name-complex="Arial2" style:font-size-complex="10.5pt" style:font-weight-complex="bold"/>
    </style:style>
    <style:style style:name="T163" style:family="text">
      <style:text-properties fo:color="#ffff00" loext:opacity="100%" style:font-name="Arial1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164" style:family="text">
      <style:text-properties fo:color="#ffff00" loext:opacity="100%" style:font-name="Arial1" fo:font-size="12pt" fo:font-weight="bold" fo:background-color="#ff9100" loext:char-shading-value="0" style:font-size-asian="12pt" style:font-weight-asian="bold" style:font-name-complex="Arial2" style:font-size-complex="12pt" style:font-weight-complex="bold"/>
    </style:style>
    <style:style style:name="T165" style:family="text">
      <style:text-properties fo:color="#ffff00" loext:opacity="100%" style:font-name="Arial1" fo:font-size="13pt" fo:font-weight="bold" fo:background-color="#ff9100" loext:char-shading-value="0" style:font-size-asian="13pt" style:font-weight-asian="bold" style:font-name-complex="Arial2" style:font-size-complex="13pt" style:font-weight-complex="bold"/>
    </style:style>
    <style:style style:name="T166" style:family="text">
      <style:text-properties fo:color="#ffff00" loext:opacity="100%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167" style:family="text">
      <style:text-properties fo:color="#ffff00" loext:opacity="100%" fo:font-size="11pt" fo:font-weight="bold" fo:background-color="#ff9100" loext:char-shading-value="0" style:font-name-asian="Arial2" style:font-size-asian="11pt" style:font-weight-asian="bold" style:font-name-complex="Arial2" style:font-size-complex="11pt" style:font-weight-complex="bold"/>
    </style:style>
    <style:style style:name="T168" style:family="text">
      <style:text-properties fo:color="#ffff00" loext:opacity="100%" fo:font-size="10.5pt" fo:font-weight="bold" fo:background-color="#ff9100" loext:char-shading-value="0" style:font-name-asian="Arial2" style:font-size-asian="10.5pt" style:font-weight-asian="bold" style:font-name-complex="Arial2" style:font-size-complex="10.5pt" style:font-weight-complex="bold"/>
    </style:style>
    <style:style style:name="T169" style:family="text">
      <style:text-properties fo:color="#ffff00" loext:opacity="100%" fo:font-size="10.5pt" fo:font-weight="bold" fo:background-color="#ff9100" loext:char-shading-value="0" style:font-size-asian="10.5pt" style:font-weight-asian="bold" style:font-name-complex="Arial2" style:font-size-complex="10.5pt" style:font-weight-complex="bold"/>
    </style:style>
    <style:style style:name="T170" style:family="text">
      <style:text-properties fo:color="#ffff00" loext:opacity="100%" fo:font-size="10.5pt" fo:font-weight="bold" fo:background-color="#1de9b6" loext:char-shading-value="0" style:font-size-asian="10.5pt" style:font-weight-asian="bold" style:font-name-complex="Arial2" style:font-size-complex="10.5pt" style:font-weight-complex="bold"/>
    </style:style>
    <style:style style:name="T171" style:family="text">
      <style:text-properties fo:color="#ffff00" loext:opacity="100%" fo:font-size="10.5pt" fo:font-weight="bold" fo:background-color="#3d5afe" loext:char-shading-value="0" style:font-name-asian="Arial2" style:font-size-asian="10.5pt" style:font-weight-asian="bold" style:font-name-complex="Arial2" style:font-size-complex="10.5pt" style:font-weight-complex="bold"/>
    </style:style>
    <style:style style:name="T172" style:family="text">
      <style:text-properties fo:color="#ffff00" loext:opacity="100%" fo:font-size="13pt" fo:font-weight="bold" fo:background-color="#ff9100" loext:char-shading-value="0" style:font-size-asian="13pt" style:font-weight-asian="bold" style:font-name-complex="Arial2" style:font-size-complex="13pt" style:font-weight-complex="bold"/>
    </style:style>
    <style:style style:name="T173" style:family="text">
      <style:text-properties fo:color="#ffff00" loext:opacity="100%" style:font-name="Courier New" fo:font-size="9.5pt" fo:font-weight="bold" fo:background-color="#ff9100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74" style:family="text">
      <style:text-properties fo:color="#3d5afe" loext:opacity="100%" style:font-name="Arial1" fo:font-size="11pt" fo:font-weight="bold" fo:background-color="#ffc400" loext:char-shading-value="0" style:font-size-asian="11pt" style:font-weight-asian="bold" style:font-name-complex="Arial2" style:font-size-complex="11pt" style:font-weight-complex="bold"/>
    </style:style>
    <style:style style:name="T175" style:family="text">
      <style:text-properties fo:color="#3d5afe" loext:opacity="100%" fo:font-size="11pt" fo:font-weight="bold" fo:background-color="#ffc400" loext:char-shading-value="0" style:font-size-asian="11pt" style:font-weight-asian="bold" style:font-name-complex="Arial2" style:font-size-complex="11pt" style:font-weight-complex="bold"/>
    </style:style>
    <style:style style:name="T176" style:family="text">
      <style:text-properties fo:color="#1f3864" loext:opacity="100%" style:font-name="Arial1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177" style:family="text">
      <style:text-properties fo:color="#1f3864" loext:opacity="100%" style:font-name="Arial1" fo:font-size="20pt" fo:font-weight="bold" style:font-size-asian="20pt" style:font-weight-asian="bold" style:font-name-complex="Arial2" style:font-size-complex="20pt" style:font-weight-complex="bold"/>
    </style:style>
    <style:style style:name="T178" style:family="text">
      <style:text-properties fo:color="#1f3864" loext:opacity="100%" style:font-name="Arial1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179" style:family="text">
      <style:text-properties fo:color="#1f3864" loext:opacity="100%" style:font-name="Arial1" fo:font-size="13pt" fo:font-weight="bold" style:font-size-asian="13pt" style:font-weight-asian="bold" style:font-name-complex="Arial2" style:font-size-complex="13pt" style:font-weight-complex="bold"/>
    </style:style>
    <style:style style:name="T180" style:family="text">
      <style:text-properties fo:color="#1a1a1a" loext:opacity="100%" style:font-name="Arial1" fo:font-size="12pt" style:font-name-asian="Arial2" style:font-size-asian="12pt" style:font-name-complex="Arial2" style:font-size-complex="12pt"/>
    </style:style>
    <style:style style:name="T181" style:family="text">
      <style:text-properties fo:color="#1a1a1a" loext:opacity="100%" style:font-name="Arial1" fo:font-size="12pt" style:font-size-asian="12pt" style:font-name-complex="Arial2" style:font-size-complex="12pt"/>
    </style:style>
    <style:style style:name="T182" style:family="text">
      <style:text-properties fo:color="#1a1a1a" loext:opacity="100%"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83" style:family="text">
      <style:text-properties fo:color="#1a1a1a" loext:opacity="100%" style:font-name="Arial1" fo:font-size="12pt" fo:font-weight="bold" style:font-size-asian="12pt" style:font-weight-asian="bold" style:font-name-complex="Arial2" style:font-size-complex="12pt" style:font-weight-complex="bold"/>
    </style:style>
    <style:style style:name="T184" style:family="text">
      <style:text-properties fo:color="#1a1a1a" loext:opacity="100%" style:font-name="Arial1" fo:font-size="12pt" fo:font-weight="bold" fo:background-color="#ffff00" loext:char-shading-value="0" style:font-size-asian="12pt" style:font-weight-asian="bold" style:font-name-complex="Arial2" style:font-size-complex="12pt" style:font-weight-complex="bold"/>
    </style:style>
    <style:style style:name="T185" style:family="text">
      <style:text-properties fo:color="#1a1a1a" loext:opacity="100%" style:font-name="Arial1" fo:font-size="12pt" fo:font-weight="bold" fo:background-color="#ffff00" loext:char-shading-value="0" style:font-name-asian="Arial2" style:font-size-asian="12pt" style:font-weight-asian="bold" style:font-name-complex="Arial2" style:font-size-complex="12pt" style:font-weight-complex="bold"/>
    </style:style>
    <style:style style:name="T186" style:family="text">
      <style:text-properties fo:color="#1a1a1a" loext:opacity="100%" style:font-name="Arial1" fo:font-size="12pt" fo:font-weight="bold" fo:background-color="#ffd740" loext:char-shading-value="0" style:font-name-asian="Arial2" style:font-size-asian="12pt" style:font-weight-asian="bold" style:font-name-complex="Arial2" style:font-size-complex="12pt" style:font-weight-complex="bold"/>
    </style:style>
    <style:style style:name="T187" style:family="text">
      <style:text-properties fo:color="#1a1a1a" loext:opacity="100%" style:font-name="Arial1" fo:font-size="12pt" fo:font-weight="bold" fo:background-color="#ffd740" loext:char-shading-value="0" style:font-size-asian="12pt" style:font-weight-asian="bold" style:font-name-complex="Arial2" style:font-size-complex="12pt" style:font-weight-complex="bold"/>
    </style:style>
    <style:style style:name="T188" style:family="text">
      <style:text-properties fo:color="#1a1a1a" loext:opacity="100%" style:font-name="Arial1" fo:font-size="12pt" fo:font-weight="bold" fo:background-color="#ffab40" loext:char-shading-value="0" style:font-size-asian="12pt" style:font-weight-asian="bold" style:font-name-complex="Arial2" style:font-size-complex="12pt" style:font-weight-complex="bold"/>
    </style:style>
    <style:style style:name="T189" style:family="text">
      <style:text-properties fo:color="#1a1a1a" loext:opacity="100%" style:font-name="Arial1" fo:font-size="12pt" fo:font-weight="bold" fo:background-color="#ffab40" loext:char-shading-value="0" style:font-name-asian="Arial2" style:font-size-asian="12pt" style:font-weight-asian="bold" style:font-name-complex="Arial2" style:font-size-complex="12pt" style:font-weight-complex="bold"/>
    </style:style>
    <style:style style:name="T190" style:family="text">
      <style:text-properties fo:color="#1a1a1a" loext:opacity="100%" style:font-name="Arial1" fo:font-size="12pt" fo:font-weight="bold" fo:background-color="#76ff03" loext:char-shading-value="0" style:font-size-asian="12pt" style:font-weight-asian="bold" style:font-name-complex="Arial2" style:font-size-complex="12pt" style:font-weight-complex="bold"/>
    </style:style>
    <style:style style:name="T191" style:family="text">
      <style:text-properties fo:color="#1a1a1a" loext:opacity="100%" style:font-name="Arial1"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T192" style:family="text">
      <style:text-properties fo:color="#1a1a1a" loext:opacity="100%" style:font-name="Arial1" fo:font-size="12pt" fo:font-weight="normal" style:font-size-asian="12pt" style:font-weight-asian="normal" style:font-name-complex="Arial2" style:font-size-complex="12pt" style:font-weight-complex="normal"/>
    </style:style>
    <style:style style:name="T193" style:family="text">
      <style:text-properties fo:color="#1a1a1a" loext:opacity="100%" style:font-name="Arial1" fo:font-size="12pt" fo:background-color="#ffff00" loext:char-shading-value="0" style:font-size-asian="12pt" style:font-name-complex="Arial2" style:font-size-complex="12pt"/>
    </style:style>
    <style:style style:name="T194" style:family="text">
      <style:text-properties fo:color="#1a1a1a" loext:opacity="100%" style:font-name="Arial1" fo:font-size="11pt" style:font-name-asian="Arial2" style:font-size-asian="11pt" style:font-name-complex="Arial2" style:font-size-complex="11pt"/>
    </style:style>
    <style:style style:name="T195" style:family="text">
      <style:text-properties fo:color="#1a1a1a" loext:opacity="100%" style:font-name="Arial1" fo:font-size="11pt" style:font-size-asian="11pt" style:font-name-complex="Arial2" style:font-size-complex="11pt"/>
    </style:style>
    <style:style style:name="T196" style:family="text">
      <style:text-properties fo:color="#2b2b2b" loext:opacity="100%" style:font-name="Courier New" fo:font-size="9.5pt" style:font-name-asian="Courier New1" style:font-size-asian="9.5pt" style:font-name-complex="Courier New1" style:font-size-complex="9.5pt"/>
    </style:style>
    <style:style style:name="T197" style:family="text">
      <style:text-properties fo:color="#2b2b2b" loext:opacity="100%" style:font-name="Courier New" fo:font-size="9.5pt" fo:font-weight="bold" fo:background-color="#ffff00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98" style:family="text">
      <style:text-properties fo:color="#2b2b2b" loext:opacity="100%" style:font-name="Courier New" fo:font-size="9.5pt" fo:font-weight="bold" fo:background-color="#18ffff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99" style:family="text">
      <style:text-properties fo:color="#d500f9" loext:opacity="100%" style:font-name="Courier New" fo:font-size="9.5pt" fo:font-weight="bold" fo:background-color="#18ffff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00" style:family="text">
      <style:text-properties fo:color="#d500f9" loext:opacity="100%" style:font-name="Courier New" fo:font-size="9.5pt" fo:font-weight="bold" fo:background-color="#f3e5f5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01" style:family="text">
      <style:text-properties fo:color="#1de9b6" loext:opacity="100%" style:font-name="Courier New" fo:font-size="9.5pt" fo:font-weight="bold" fo:background-color="#6d4c41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02" style:family="text">
      <style:text-properties fo:color="#1de9b6" loext:opacity="100%" style:font-name="Courier New" fo:font-size="9.5pt" style:font-name-asian="Courier New1" style:font-size-asian="9.5pt" style:font-name-complex="Courier New1" style:font-size-complex="9.5pt"/>
    </style:style>
    <style:style style:name="T203" style:family="text">
      <style:text-properties fo:color="#8d6e63" loext:opacity="100%" style:font-name="Arial1" fo:font-size="12pt" fo:font-weight="bold" fo:background-color="#76ff03" loext:char-shading-value="0" style:font-size-asian="12pt" style:font-weight-asian="bold" style:font-name-complex="Arial2" style:font-size-complex="12pt" style:font-weight-complex="bold"/>
    </style:style>
    <style:style style:name="T204" style:family="text">
      <style:text-properties fo:color="#e0e0e0" loext:opacity="100%" style:font-name="Arial1" fo:font-size="12pt" fo:font-weight="bold" fo:background-color="#ff1744" loext:char-shading-value="0" style:font-size-asian="12pt" style:font-weight-asian="bold" style:font-name-complex="Arial2" style:font-size-complex="12pt" style:font-weight-complex="bold"/>
    </style:style>
    <style:style style:name="T205" style:family="text">
      <style:text-properties fo:color="#e0e0e0" loext:opacity="100%" style:font-name="Arial1" fo:font-size="12pt" fo:font-weight="bold" fo:background-color="#ff4081" loext:char-shading-value="0" style:font-size-asian="12pt" style:font-weight-asian="bold" style:font-name-complex="Arial2" style:font-size-complex="12pt" style:font-weight-complex="bold"/>
    </style:style>
    <style:style style:name="T206" style:family="text">
      <style:text-properties fo:color="#404040" loext:opacity="100%" style:font-name="Arial1" fo:font-size="11pt" style:font-name-asian="Arial2" style:font-size-asian="11pt" style:font-name-complex="Arial2" style:font-size-complex="11pt"/>
    </style:style>
    <style:style style:name="T207" style:family="text">
      <style:text-properties fo:color="#404040" loext:opacity="100%" fo:font-size="11pt" style:font-name-asian="Arial2" style:font-size-asian="11pt" style:font-name-complex="Arial2" style:font-size-complex="11pt"/>
    </style:style>
    <style:style style:name="T208" style:family="text">
      <style:text-properties fo:color="#eeff41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209" style:family="text">
      <style:text-properties fo:color="#eeff41" loext:opacity="100%" fo:font-size="10.5pt" fo:background-color="#d500f9" loext:char-shading-value="0" style:font-name-asian="Arial2" style:font-size-asian="10.5pt" style:font-name-complex="Arial2" style:font-size-complex="10.5pt"/>
    </style:style>
    <style:style style:name="T210" style:family="text">
      <style:text-properties fo:color="#eeff41" loext:opacity="100%" fo:font-size="10.5pt" fo:background-color="#ff1744" loext:char-shading-value="0" style:font-name-asian="Arial2" style:font-size-asian="10.5pt" style:font-name-complex="Arial2" style:font-size-complex="10.5pt"/>
    </style:style>
    <style:style style:name="T211" style:family="text">
      <style:text-properties fo:color="#ffc400" loext:opacity="100%" fo:font-size="10.5pt" fo:font-weight="bold" fo:background-color="#3d5afe" loext:char-shading-value="0" style:font-name-asian="Arial2" style:font-size-asian="10.5pt" style:font-weight-asian="bold" style:font-name-complex="Arial2" style:font-size-complex="10.5pt" style:font-weight-complex="bold"/>
    </style:style>
    <style:style style:name="T212" style:family="text">
      <style:text-properties fo:font-size="10.5pt" style:font-name-asian="Arial2" style:font-size-asian="10.5pt" style:font-name-complex="Arial2" style:font-size-complex="10.5pt"/>
    </style:style>
    <style:style style:name="T213" style:family="text">
      <style:text-properties fo:color="#ffffff" loext:opacity="100%"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214" style:family="text">
      <style:text-properties fo:color="#ffffff" loext:opacity="100%" style:font-name="Arial1" fo:font-size="11pt" fo:font-weight="bold" style:font-size-asian="11pt" style:font-weight-asian="bold" style:font-name-complex="Arial2" style:font-size-complex="11pt" style:font-weight-complex="bold"/>
    </style:style>
    <style:style style:name="T215" style:family="text">
      <style:text-properties fo:color="#ffea00" loext:opacity="100%" fo:font-size="10.5pt" fo:background-color="#e65100" loext:char-shading-value="0" style:font-name-asian="Arial2" style:font-size-asian="10.5pt" style:font-name-complex="Arial2" style:font-size-complex="10.5pt"/>
    </style:style>
    <style:style style:name="T216" style:family="text">
      <style:text-properties fo:color="#ffea00" loext:opacity="100%" fo:font-size="10.5pt" fo:font-weight="bold" fo:background-color="#e65100" loext:char-shading-value="0" style:font-name-asian="Arial2" style:font-size-asian="10.5pt" style:font-weight-asian="bold" style:font-name-complex="Arial2" style:font-size-complex="10.5pt" style:font-weight-complex="bold"/>
    </style:style>
    <style:style style:name="T217" style:family="text">
      <style:text-properties fo:color="#e1bee7" loext:opacity="100%" style:font-name="Arial1" fo:font-size="10.5pt" fo:background-color="#4a148c" loext:char-shading-value="0" style:font-size-asian="10.5pt" style:font-name-complex="Arial2" style:font-size-complex="10.5pt"/>
    </style:style>
    <style:style style:name="T218" style:family="text">
      <style:text-properties fo:color="#e1bee7" loext:opacity="100%" style:font-name="Arial1" fo:font-size="10.5pt" fo:font-weight="bold" fo:background-color="#4a148c" loext:char-shading-value="0" style:font-size-asian="10.5pt" style:font-weight-asian="bold" style:font-name-complex="Arial2" style:font-size-complex="10.5pt" style:font-weight-complex="bold"/>
    </style:style>
    <style:style style:name="T219" style:family="text">
      <style:text-properties fo:color="#e1bee7" loext:opacity="100%" fo:font-size="10.5pt" fo:background-color="#4a148c" loext:char-shading-value="0" style:font-name-asian="Arial2" style:font-size-asian="10.5pt" style:font-name-complex="Arial2" style:font-size-complex="10.5pt"/>
    </style:style>
    <style:style style:name="T220" style:family="text">
      <style:text-properties fo:color="#e1bee7" loext:opacity="100%" fo:font-size="10.5pt" fo:font-weight="bold" fo:background-color="#4a148c" loext:char-shading-value="0" style:font-name-asian="Arial2" style:font-size-asian="10.5pt" style:font-weight-asian="bold" style:font-name-complex="Arial2" style:font-size-complex="10.5pt" style:font-weight-complex="bold"/>
    </style:style>
    <style:style style:name="T221" style:family="text">
      <style:text-properties fo:color="#d1c4e9" loext:opacity="100%" fo:font-size="10.5pt" fo:background-color="#311b92" loext:char-shading-value="0" style:font-name-asian="Arial2" style:font-size-asian="10.5pt" style:font-name-complex="Arial2" style:font-size-complex="10.5pt"/>
    </style:style>
    <style:style style:name="T222" style:family="text">
      <style:text-properties fo:color="#d1c4e9" loext:opacity="100%" fo:font-size="10.5pt" fo:background-color="#311b92" loext:char-shading-value="0" style:font-name-asian="Arial2" style:font-size-asian="10.5pt" style:font-name-complex="Arial2" style:font-size-complex="10.5pt"/>
    </style:style>
    <style:style style:name="T223" style:family="text">
      <style:text-properties fo:color="#d1c4e9" loext:opacity="100%" fo:font-size="10.5pt" fo:font-weight="bold" fo:background-color="#311b92" loext:char-shading-value="0" style:font-name-asian="Arial2" style:font-size-asian="10.5pt" style:font-weight-asian="bold" style:font-name-complex="Arial2" style:font-size-complex="10.5pt" style:font-weight-complex="bold"/>
    </style:style>
    <style:style style:name="T224" style:family="text">
      <style:text-properties fo:color="#d1c4e9" loext:opacity="100%" fo:font-size="10.5pt" style:font-name-asian="Arial2" style:font-size-asian="10.5pt" style:font-name-complex="Arial2" style:font-size-complex="10.5pt"/>
    </style:style>
    <style:style style:name="T225" style:family="text">
      <style:text-properties fo:color="#d1c4e9" loext:opacity="100%" style:font-name="Arial1" fo:font-size="10.5pt" fo:background-color="#311b92" loext:char-shading-value="0" style:font-size-asian="10.5pt" style:font-name-complex="Arial2" style:font-size-complex="10.5pt"/>
    </style:style>
    <style:style style:name="T226" style:family="text">
      <style:text-properties fo:color="#d1c4e9" loext:opacity="100%" style:font-name="Arial1" fo:font-size="10.5pt" fo:background-color="#311b92" loext:char-shading-value="0" style:font-size-asian="10.5pt" style:font-name-complex="Arial2" style:font-size-complex="10.5pt"/>
    </style:style>
    <style:style style:name="T227" style:family="text">
      <style:text-properties fo:color="#d1c4e9" loext:opacity="100%" style:font-name="Arial1" fo:font-size="10.5pt" fo:font-weight="bold" fo:background-color="#311b92" loext:char-shading-value="0" style:font-size-asian="10.5pt" style:font-weight-asian="bold" style:font-name-complex="Arial2" style:font-size-complex="10.5pt" style:font-weight-complex="bold"/>
    </style:style>
    <style:style style:name="T228" style:family="text">
      <style:text-properties fo:color="#d1c4e9" loext:opacity="100%" style:font-name="Arial1" fo:font-size="10.5pt" style:font-size-asian="10.5pt" style:font-name-complex="Arial2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 loext:marker-style-name="T1"><text:span text:style-name="T2">【</text:span><text:span text:style-name="T9">11</text:span><text:span text:style-name="T2">】堆積（</text:span><text:span text:style-name="T9">Heap</text:span><text:span text:style-name="T2">）＋優先佇列（</text:span><text:span text:style-name="T9">Priority Queue</text:span><text:span text:style-name="T2">）</text:span></text:p>
      <text:p text:style-name="P30" loext:marker-style-name="T15"><text:span text:style-name="T16">資訊類公職考試完整筆記 ● 考點：</text:span><text:span text:style-name="T24">110</text:span><text:span text:style-name="T16">地</text:span><text:span text:style-name="T24">Q4</text:span><text:span text:style-name="T16">、</text:span><text:span text:style-name="T24">111</text:span><text:span text:style-name="T16">地</text:span><text:span text:style-name="T24">Q4</text:span><text:span text:style-name="T16">、</text:span><text:span text:style-name="T24">113</text:span><text:span text:style-name="T16">地</text:span><text:span text:style-name="T24">Q3</text:span><text:span text:style-name="T16">、</text:span><text:span text:style-name="T24">114</text:span><text:span text:style-name="T16">地</text:span><text:span text:style-name="T24">Q2</text:span></text:p>
      <text:p text:style-name="P1"/>
      <text:h text:style-name="P13" text:outline-level="1" loext:marker-style-name="T3"><text:span text:style-name="T4">一、</text:span><text:span text:style-name="T10">Heap </text:span><text:span text:style-name="T4">的定義與兩大條件</text:span></text:h>
      <text:p text:style-name="P32" loext:marker-style-name="T27"><text:span text:style-name="T46">Heap</text:span><text:span text:style-name="T28">（堆積）是一種特殊的二元樹，必須同時滿足以下兩個條件，缺一不可：</text:span></text:p>
      <text:p text:style-name="P1"/>
      <text:h text:style-name="P16" text:outline-level="2" loext:marker-style-name="T17"><text:span text:style-name="T18">條件</text:span><text:span text:style-name="T25">1</text:span><text:span text:style-name="T18">：</text:span><text:span text:style-name="T25">Complete Binary Tree</text:span><text:span text:style-name="T18">（完全二元樹）</text:span></text:h>
      <text:list xml:id="list4253724859" text:style-name="WWNum5">
        <text:list-item text:start-value="1">
          <text:p text:style-name="P19" loext:marker-style-name="T33"><text:span text:style-name="T69">每一層節點都必須盡量填滿</text:span><text:span text:style-name="T34">。</text:span></text:p>
        </text:list-item>
        <text:list-item text:style-override="WWNum6">
          <text:p text:style-name="P20" loext:marker-style-name="T33"><text:span text:style-name="T35">最後一層</text:span><text:span text:style-name="T34">的節點必須</text:span><text:span text:style-name="T82">從左往右依序填入</text:span><text:span text:style-name="T34">，</text:span><text:span text:style-name="T85">不可跳過</text:span><text:span text:style-name="T34">。</text:span></text:p>
        </text:list-item>
      </text:list>
      <text:p text:style-name="P1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2" loext:marker-style-name="T40"><text:span text:style-name="T51">✅ </text:span><text:span text:style-name="T41">合法 </text:span><text:span text:style-name="T51">Complete Binary Tree</text:span><text:span text:style-name="T41">：</text:span></text:p>
          </table:table-cell>
        </table:table-row>
        <table:table-row table:style-name="表格1.1">
          <table:table-cell table:style-name="表格1.A1" office:value-type="string">
            <text:p text:style-name="P2" loext:marker-style-name="T40"><text:span text:style-name="T51"><text:s text:c="7"/>100</text:span><text:span text:style-name="T40"/></text:p>
          </table:table-cell>
        </table:table-row>
        <table:table-row table:style-name="表格1.1">
          <table:table-cell table:style-name="表格1.A1" office:value-type="string">
            <text:p text:style-name="P2" loext:marker-style-name="T40"><text:span text:style-name="T51"><text:s text:c="8"/>/ <text:s text:c="2"/>\</text:span><text:span text:style-name="T40"/></text:p>
          </table:table-cell>
        </table:table-row>
        <table:table-row table:style-name="表格1.1">
          <table:table-cell table:style-name="表格1.A1" office:value-type="string">
            <text:p text:style-name="P2" loext:marker-style-name="T40"><text:span text:style-name="T51"><text:s text:c="4"/>90 <text:s text:c="4"/>80</text:span><text:span text:style-name="T40"/></text:p>
          </table:table-cell>
        </table:table-row>
        <table:table-row table:style-name="表格1.1">
          <table:table-cell table:style-name="表格1.A1" office:value-type="string">
            <text:p text:style-name="P2" loext:marker-style-name="T40"><text:span text:style-name="T51"><text:s text:c="4"/>/ \ <text:s text:c="5"/>/</text:span><text:span text:style-name="T40"/></text:p>
          </table:table-cell>
        </table:table-row>
        <table:table-row table:style-name="表格1.1">
          <table:table-cell table:style-name="表格1.A1" office:value-type="string">
            <text:p text:style-name="P2" loext:marker-style-name="T36"><text:span text:style-name="T52">70 <text:s/>60 50</text:span><text:span text:style-name="T36"/></text:p>
          </table:table-cell>
        </table:table-row>
        <table:table-row table:style-name="表格1.1">
          <table:table-cell table:style-name="表格1.A1" office:value-type="string">
            <text:p text:style-name="P2"/>
          </table:table-cell>
        </table:table-row>
        <table:table-row table:style-name="表格1.1">
          <table:table-cell table:style-name="表格1.A1" office:value-type="string">
            <text:p text:style-name="P2" loext:marker-style-name="T40"><text:span text:style-name="T51">❌ </text:span><text:span text:style-name="T41">不合法（左邊空著）：</text:span></text:p>
          </table:table-cell>
        </table:table-row>
        <table:table-row table:style-name="表格1.1">
          <table:table-cell table:style-name="表格1.A1" office:value-type="string">
            <text:p text:style-name="P2" loext:marker-style-name="T40"><text:span text:style-name="T51"><text:s text:c="7"/>100</text:span><text:span text:style-name="T40"/></text:p>
          </table:table-cell>
        </table:table-row>
        <table:table-row table:style-name="表格1.1">
          <table:table-cell table:style-name="表格1.A1" office:value-type="string">
            <text:p text:style-name="P2" loext:marker-style-name="T40"><text:span text:style-name="T51"><text:s text:c="8"/>/ <text:s text:c="2"/>\</text:span><text:span text:style-name="T40"/></text:p>
          </table:table-cell>
        </table:table-row>
        <table:table-row table:style-name="表格1.1">
          <table:table-cell table:style-name="表格1.A1" office:value-type="string">
            <text:p text:style-name="P2" loext:marker-style-name="T40"><text:span text:style-name="T51"><text:s text:c="4"/>90 <text:s text:c="4"/>80</text:span><text:span text:style-name="T40"/></text:p>
          </table:table-cell>
        </table:table-row>
        <table:table-row table:style-name="表格1.1">
          <table:table-cell table:style-name="表格1.A1" office:value-type="string">
            <text:p text:style-name="P2" loext:marker-style-name="T40"><text:span text:style-name="T51"><text:s text:c="8"/>\ <text:s text:c="2"/>/</text:span><text:span text:style-name="T40"/></text:p>
          </table:table-cell>
        </table:table-row>
        <table:table-row table:style-name="表格1.1">
          <table:table-cell table:style-name="表格1.A1" office:value-type="string">
            <text:p text:style-name="P2" loext:marker-style-name="T40"><text:span text:style-name="T51"><text:s text:c="6"/></text:span><text:span text:style-name="T52">60 50</text:span></text:p>
          </table:table-cell>
        </table:table-row>
      </table:table>
      <text:p text:style-name="P1"/>
      <text:h text:style-name="P16" text:outline-level="2" loext:marker-style-name="T17"><text:span text:style-name="T18">條件</text:span><text:span text:style-name="T25">2</text:span><text:span text:style-name="T18">：</text:span><text:span text:style-name="T25">Heap Property</text:span><text:span text:style-name="T18">（堆積性質）</text:span></text:h>
      <text:p text:style-name="P32" loext:marker-style-name="T27"><text:span text:style-name="T28">父節點與子節點之間必須滿足固定的大小關係，分為兩種：</text:span><text:span text:style-name="T27"/></text:p>
      <text:p text:style-name="P1"/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 table:style-name="表格2.1">
            <table:table-cell table:style-name="表格2.A1" office:value-type="string">
              <text:p text:style-name="P31" loext:marker-style-name="T5"><text:span text:style-name="T6">類型</text:span><text:span text:style-name="T5"/></text:p>
            </table:table-cell>
            <table:table-cell table:style-name="表格2.A1" office:value-type="string">
              <text:p text:style-name="P31" loext:marker-style-name="T5"><text:span text:style-name="T6">規則</text:span><text:span text:style-name="T5"/></text:p>
            </table:table-cell>
            <table:table-cell table:style-name="表格2.A1" office:value-type="string">
              <text:p text:style-name="P31" loext:marker-style-name="T5"><text:span text:style-name="T6">範例</text:span><text:span text:style-name="T5"/></text:p>
            </table:table-cell>
          </table:table-row>
        </table:table-header-rows>
        <table:table-row table:style-name="表格2.1">
          <table:table-cell table:style-name="表格2.A2" office:value-type="string">
            <text:p text:style-name="P31" loext:marker-style-name="T40"><text:span text:style-name="T101">Min</text:span><text:span text:style-name="T51"> Heap</text:span></text:p>
          </table:table-cell>
          <table:table-cell table:style-name="表格2.A2" office:value-type="string">
            <text:p text:style-name="P31" loext:marker-style-name="T40"><text:span text:style-name="T51">parent ≤ child</text:span><text:span text:style-name="T41">（</text:span><text:span text:style-name="T37">父小子大</text:span><text:span text:style-name="T41">）</text:span></text:p>
          </table:table-cell>
          <table:table-cell table:style-name="表格2.A2" office:value-type="string">
            <text:p text:style-name="P31" loext:marker-style-name="T40"><text:span text:style-name="T51">Root </text:span><text:span text:style-name="T41">必為最小值</text:span></text:p>
          </table:table-cell>
        </table:table-row>
        <table:table-row table:style-name="表格2.1">
          <table:table-cell table:style-name="表格2.A3" office:value-type="string">
            <text:p text:style-name="P31" loext:marker-style-name="T40"><text:span text:style-name="T110">Max</text:span><text:span text:style-name="T51"> Heap</text:span></text:p>
          </table:table-cell>
          <table:table-cell table:style-name="表格2.A3" office:value-type="string">
            <text:p text:style-name="P31" loext:marker-style-name="T40"><text:span text:style-name="T51">parent ≥ child</text:span><text:span text:style-name="T41">（</text:span><text:span text:style-name="T38">父大子小</text:span><text:span text:style-name="T41">）</text:span></text:p>
          </table:table-cell>
          <table:table-cell table:style-name="表格2.A3" office:value-type="string">
            <text:p text:style-name="P31" loext:marker-style-name="T40"><text:span text:style-name="T51">Root </text:span><text:span text:style-name="T41">必為最大值</text:span></text:p>
          </table:table-cell>
        </table:table-row>
      </table:table>
      <text:p text:style-name="P1"><text:soft-page-break/></text:p>
      <text:p text:style-name="P1"/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2" loext:marker-style-name="T40"><text:span text:style-name="T51">📌 </text:span><text:span text:style-name="T41">核心公式（必背）</text:span></text:p>
          </table:table-cell>
        </table:table-row>
        <table:table-row table:style-name="表格3.1">
          <table:table-cell table:style-name="表格3.A1" office:value-type="string">
            <text:p text:style-name="P2" loext:marker-style-name="T40"><text:span text:style-name="T52">Heap</text:span><text:span text:style-name="T51"> = </text:span><text:span text:style-name="T117">Complete Binary Tree + Heap Property</text:span></text:p>
          </table:table-cell>
        </table:table-row>
      </table:table>
      <text:p text:style-name="P1"/>
      <text:p text:style-name="P1"/>
      <text:h text:style-name="P13" text:outline-level="1" loext:marker-style-name="T3"><text:span text:style-name="T4">二、</text:span><text:span text:style-name="T10">Heap </text:span><text:span text:style-name="T4">的陣列表示法（</text:span><text:span text:style-name="T10">Implicit Array</text:span><text:span text:style-name="T4">）</text:span></text:h>
      <text:p text:style-name="P32" loext:marker-style-name="T27"><text:span text:style-name="T28">由於 </text:span><text:span text:style-name="T118">Heap </text:span><text:span text:style-name="T120">是 </text:span><text:span text:style-name="T118">Complete Binary Tree</text:span><text:span text:style-name="T28">，</text:span><text:span text:style-name="T134">節點位置完全可預測</text:span><text:span text:style-name="T28">，因此不需要指標（</text:span><text:span text:style-name="T46">pointer</text:span><text:span text:style-name="T28">），直接用陣列儲存即可，這稱為 </text:span><text:span text:style-name="T46">Implicit Array</text:span><text:span text:style-name="T28">（隱式陣列）。</text:span></text:p>
      <text:p text:style-name="P1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2" loext:marker-style-name="T40"><text:span text:style-name="T41">【索引公式 — 考試必背】</text:span><text:span text:style-name="T40"/></text:p>
          </table:table-cell>
        </table:table-row>
        <table:table-row table:style-name="表格4.1">
          <table:table-cell table:style-name="表格4.A1" office:value-type="string">
            <text:p text:style-name="P2" loext:marker-style-name="T40"><text:span text:style-name="T51"><text:s text:c="2"/>Root <text:s text:c="5"/>→ A[1]</text:span><text:span text:style-name="T40"/></text:p>
          </table:table-cell>
        </table:table-row>
        <table:table-row table:style-name="表格4.1">
          <table:table-cell table:style-name="表格4.A1" office:value-type="string">
            <text:p text:style-name="P2" loext:marker-style-name="T40"><text:span text:style-name="T51"><text:s text:c="2"/></text:span><text:span text:style-name="T141">Parent</text:span><text:span text:style-name="T51"> <text:s text:c="3"/>→ A[</text:span><text:span text:style-name="T91">i / 2</text:span><text:span text:style-name="T51">] <text:s text:c="5"/></text:span><text:span text:style-name="T41">（整數除法）</text:span></text:p>
          </table:table-cell>
        </table:table-row>
        <table:table-row table:style-name="表格4.1">
          <table:table-cell table:style-name="表格4.A1" office:value-type="string">
            <text:p text:style-name="P2" loext:marker-style-name="T40"><text:span text:style-name="T51"><text:s text:c="2"/></text:span><text:span text:style-name="T127">Left child</text:span><text:span text:style-name="T51"> → A[</text:span><text:span text:style-name="T102">2i</text:span><text:span text:style-name="T51">] <text:s text:c="6"/></text:span><text:span text:style-name="T41">（</text:span><text:span text:style-name="T150">多生貴子</text:span><text:span text:style-name="T41">）</text:span></text:p>
          </table:table-cell>
        </table:table-row>
        <table:table-row table:style-name="表格4.1">
          <table:table-cell table:style-name="表格4.A1" office:value-type="string">
            <text:p text:style-name="P2" loext:marker-style-name="T40"><text:span text:style-name="T51"><text:s text:c="2"/></text:span><text:span text:style-name="T127">Right child</text:span><text:span text:style-name="T51"> → A[</text:span><text:span text:style-name="T102">2i + 1</text:span><text:span text:style-name="T51">]</text:span></text:p>
          </table:table-cell>
        </table:table-row>
      </table:table>
      <text:p text:style-name="P1"/>
      <text:h text:style-name="P16" text:outline-level="2" loext:marker-style-name="T17"><text:span text:style-name="T18">範例</text:span><text:span text:style-name="T17"/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2" loext:marker-style-name="T40"><text:span text:style-name="T41">樹狀結構：</text:span><text:span text:style-name="T40"/></text:p>
          </table:table-cell>
        </table:table-row>
        <table:table-row table:style-name="表格5.1">
          <table:table-cell table:style-name="表格5.A1" office:value-type="string">
            <text:p text:style-name="P2" loext:marker-style-name="T40"><text:span text:style-name="T51"><text:s text:c="8"/>100</text:span><text:span text:style-name="T40"/></text:p>
          </table:table-cell>
        </table:table-row>
        <table:table-row table:style-name="表格5.1">
          <table:table-cell table:style-name="表格5.A1" office:value-type="string">
            <text:p text:style-name="P2" loext:marker-style-name="T40"><text:span text:style-name="T51"><text:s text:c="7"/>/ <text:s text:c="2"/>\</text:span><text:span text:style-name="T40"/></text:p>
          </table:table-cell>
        </table:table-row>
        <table:table-row table:style-name="表格5.1">
          <table:table-cell table:style-name="表格5.A1" office:value-type="string">
            <text:p text:style-name="P2" loext:marker-style-name="T40"><text:span text:style-name="T51"><text:s text:c="5"/>90 <text:s text:c="4"/>80</text:span><text:span text:style-name="T40"/></text:p>
          </table:table-cell>
        </table:table-row>
        <table:table-row table:style-name="表格5.1">
          <table:table-cell table:style-name="表格5.A1" office:value-type="string">
            <text:p text:style-name="P2" loext:marker-style-name="T40"><text:span text:style-name="T51"><text:s text:c="5"/>/ \ <text:s text:c="4"/>/</text:span><text:span text:style-name="T40"/></text:p>
          </table:table-cell>
        </table:table-row>
        <table:table-row table:style-name="表格5.1">
          <table:table-cell table:style-name="表格5.A1" office:value-type="string">
            <text:p text:style-name="P2" loext:marker-style-name="T40"><text:span text:style-name="T51"><text:s/>70 <text:s/>60 50</text:span><text:span text:style-name="T40"/></text:p>
          </table:table-cell>
        </table:table-row>
        <table:table-row table:style-name="表格5.1">
          <table:table-cell table:style-name="表格5.A1" office:value-type="string">
            <text:p text:style-name="P2"/>
          </table:table-cell>
        </table:table-row>
        <table:table-row table:style-name="表格5.1">
          <table:table-cell table:style-name="表格5.A1" office:value-type="string">
            <text:p text:style-name="P2" loext:marker-style-name="T40"><text:span text:style-name="T41">陣列儲存：</text:span><text:span text:style-name="T40"/></text:p>
          </table:table-cell>
        </table:table-row>
        <table:table-row table:style-name="表格5.1">
          <table:table-cell table:style-name="表格5.A1" office:value-type="string">
            <text:p text:style-name="P2" loext:marker-style-name="T40"><text:span text:style-name="T51"><text:s text:c="2"/>Index: <text:s/>1 <text:s text:c="3"/>2 <text:s text:c="3"/>3 <text:s text:c="3"/>4 <text:s text:c="3"/>5 <text:s text:c="3"/>6</text:span><text:span text:style-name="T40"/></text:p>
          </table:table-cell>
        </table:table-row>
        <table:table-row table:style-name="表格5.1">
          <table:table-cell table:style-name="表格5.A1" office:value-type="string">
            <text:p text:style-name="P2" loext:marker-style-name="T40"><text:span text:style-name="T51"><text:s text:c="2"/>Value: 100 <text:s text:c="2"/>90 <text:s text:c="2"/>80 <text:s text:c="2"/>70 <text:s text:c="2"/>60 <text:s text:c="2"/>50</text:span><text:span text:style-name="T40"/></text:p>
          </table:table-cell>
        </table:table-row>
        <table:table-row table:style-name="表格5.1">
          <table:table-cell table:style-name="表格5.A1" office:value-type="string">
            <text:p text:style-name="P2"/>
          </table:table-cell>
        </table:table-row>
        <table:table-row table:style-name="表格5.1">
          <table:table-cell table:style-name="表格5.A1" office:value-type="string">
            <text:p text:style-name="P2" loext:marker-style-name="T40"><text:span text:style-name="T41">驗證：</text:span><text:span text:style-name="T51">A[5] = 60</text:span><text:span text:style-name="T41">，</text:span><text:span text:style-name="T104">Parent = A[5/2] = A[2] </text:span><text:span text:style-name="T51">= 90 ✅</text:span></text:p>
          </table:table-cell>
        </table:table-row>
        <table:table-row table:style-name="表格5.1">
          <table:table-cell table:style-name="表格5.A1" office:value-type="string">
            <text:p text:style-name="P2" loext:marker-style-name="T40"><text:span text:style-name="T51"><text:s text:c="6"/></text:span><text:span text:style-name="T95">Left child = A[10]</text:span><text:span text:style-name="T41">，</text:span><text:span text:style-name="T216">Right child = A[11]</text:span><text:span text:style-name="T41">（皆為空）</text:span></text:p>
          </table:table-cell>
        </table:table-row>
      </table:table>
      <text:p text:style-name="P1"/>
      <text:p text:style-name="P1"/>
      <table:table table:name="表格6" table:style-name="表格6">
        <table:table-column table:style-name="表格6.A"/>
        <text:soft-page-break/>
        <table:table-row table:style-name="表格6.1">
          <table:table-cell table:style-name="表格6.A1" office:value-type="string">
            <text:p text:style-name="P2" loext:marker-style-name="T40"><text:span text:style-name="T51">⚠️ <text:s/></text:span><text:span text:style-name="T41">考試陷阱：</text:span><text:span text:style-name="T86">陣列索引從 </text:span><text:span text:style-name="T91">1 </text:span><text:span text:style-name="T86">開始</text:span><text:span text:style-name="T41">，</text:span><text:span text:style-name="T35">不是 </text:span><text:span text:style-name="T52">0</text:span><text:span text:style-name="T41">。</text:span></text:p>
          </table:table-cell>
        </table:table-row>
        <table:table-row table:style-name="表格6.1">
          <table:table-cell table:style-name="表格6.A1" office:value-type="string">
            <text:p text:style-name="P2" loext:marker-style-name="T40"><text:span text:style-name="T51"><text:s text:c="5"/></text:span><text:span text:style-name="T41">若從 </text:span><text:span text:style-name="T51">0 </text:span><text:span text:style-name="T41">開始則公式不同：</text:span><text:span text:style-name="T51">parent=(i-1)/2, left=2i+1, right=2i+2</text:span><text:span text:style-name="T41">。</text:span></text:p>
          </table:table-cell>
        </table:table-row>
        <table:table-row table:style-name="表格6.1">
          <table:table-cell table:style-name="表格6.A1" office:value-type="string">
            <text:p text:style-name="P2" loext:marker-style-name="T40"><text:span text:style-name="T51"><text:s text:c="5"/></text:span><text:span text:style-name="T41">考題若未特別說明，</text:span><text:span text:style-name="T218">預設從 </text:span><text:span text:style-name="T220">1 </text:span><text:span text:style-name="T218">開始</text:span><text:span text:style-name="T41">。</text:span></text:p>
          </table:table-cell>
        </table:table-row>
      </table:table>
      <text:p text:style-name="P1"/>
      <text:p text:style-name="P1"/>
      <text:h text:style-name="P13" text:outline-level="1" loext:marker-style-name="T3"><text:span text:style-name="T4">三、</text:span><text:span text:style-name="T10">Heap </text:span><text:span text:style-name="T4">的核心操作與時間複雜度</text:span></text:h>
      <text:h text:style-name="P16" text:outline-level="2" loext:marker-style-name="T17"><text:span text:style-name="T25">3-1 </text:span><text:span text:style-name="T18">插入（</text:span><text:span text:style-name="T25">Insert</text:span><text:span text:style-name="T18">）— </text:span><text:span text:style-name="T25">Bubble Up</text:span><text:span text:style-name="T18">（向上浮）</text:span></text:h>
      <text:p text:style-name="P32" loext:marker-style-name="T27"><text:span text:style-name="T28">步驟：</text:span><text:span text:style-name="T27"/></text:p>
      <text:list xml:id="list83242008581833" text:continue-list="list4253724859" text:style-name="WWNum7">
        <text:list-item>
          <text:p text:style-name="P21" loext:marker-style-name="T33"><text:span text:style-name="T57">Step 1</text:span><text:span text:style-name="T34">：</text:span><text:span text:style-name="T152">將新元素放到陣列最後一個位置</text:span><text:span text:style-name="T34">（</text:span><text:span text:style-name="T57">Complete Binary Tree </text:span><text:span text:style-name="T34">的下一個</text:span><text:span text:style-name="T35">空位</text:span><text:span text:style-name="T34">）。</text:span></text:p>
        </text:list-item>
        <text:list-item text:style-override="WWNum8">
          <text:p text:style-name="P22" loext:marker-style-name="T33"><text:span text:style-name="T57">Step 2</text:span><text:span text:style-name="T34">：</text:span><text:span text:style-name="T144">與父節點比較</text:span><text:span text:style-name="T34">，若違反 </text:span><text:span text:style-name="T57">Heap Property</text:span><text:span text:style-name="T34">，則交換。</text:span></text:p>
        </text:list-item>
        <text:list-item text:style-override="WWNum9">
          <text:p text:style-name="P23" loext:marker-style-name="T33"><text:span text:style-name="T57">Step 3</text:span><text:span text:style-name="T34">：重複 </text:span><text:span text:style-name="T57">Step 2</text:span><text:span text:style-name="T34">，一路往上，直到滿足 </text:span><text:span text:style-name="T57">Heap Property </text:span><text:span text:style-name="T34">或抵達 </text:span><text:span text:style-name="T57">Root </text:span><text:span text:style-name="T34">為止。</text:span></text:p>
        </text:list-item>
      </text:list>
      <text:p text:style-name="P1"/>
      <text:p text:style-name="P34" loext:marker-style-name="T7"><text:span text:style-name="T8">完整範例：</text:span><text:span text:style-name="T12">Max Heap </text:span><text:span text:style-name="T8">插入 </text:span><text:span text:style-name="T12">95</text:span>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2" loext:marker-style-name="T40"><text:span text:style-name="T41">原始 </text:span><text:span text:style-name="T51">Max Heap</text:span><text:span text:style-name="T41">：</text:span></text:p>
          </table:table-cell>
        </table:table-row>
        <table:table-row table:style-name="表格7.1">
          <table:table-cell table:style-name="表格7.A1" office:value-type="string">
            <text:p text:style-name="P2" loext:marker-style-name="T40"><text:span text:style-name="T51"><text:s text:c="8"/>100</text:span><text:span text:style-name="T40"/></text:p>
          </table:table-cell>
        </table:table-row>
        <table:table-row table:style-name="表格7.1">
          <table:table-cell table:style-name="表格7.A1" office:value-type="string">
            <text:p text:style-name="P2" loext:marker-style-name="T40"><text:span text:style-name="T51"><text:s text:c="7"/>/ <text:s text:c="2"/>\</text:span><text:span text:style-name="T40"/></text:p>
          </table:table-cell>
        </table:table-row>
        <table:table-row table:style-name="表格7.1">
          <table:table-cell table:style-name="表格7.A1" office:value-type="string">
            <text:p text:style-name="P2" loext:marker-style-name="T40"><text:span text:style-name="T51"><text:s text:c="6"/>90 <text:s text:c="3"/>80</text:span><text:span text:style-name="T40"/></text:p>
          </table:table-cell>
        </table:table-row>
        <table:table-row table:style-name="表格7.1">
          <table:table-cell table:style-name="表格7.A1" office:value-type="string">
            <text:p text:style-name="P2" loext:marker-style-name="T40"><text:span text:style-name="T51"><text:s text:c="5"/>/ <text:s/>\ <text:s text:c="3"/>/</text:span><text:span text:style-name="T40"/></text:p>
          </table:table-cell>
        </table:table-row>
        <table:table-row table:style-name="表格7.1">
          <table:table-cell table:style-name="表格7.A1" office:value-type="string">
            <text:p text:style-name="P2" loext:marker-style-name="T40"><text:span text:style-name="T51">70 <text:s/>60 50</text:span><text:span text:style-name="T40"/></text:p>
          </table:table-cell>
        </table:table-row>
        <table:table-row table:style-name="表格7.1">
          <table:table-cell table:style-name="表格7.A1" office:value-type="string">
            <text:p text:style-name="P2" loext:marker-style-name="T40"><text:span text:style-name="T41">陣列：</text:span><text:span text:style-name="T51">[100, 90, 80, 70, 60, 50]</text:span></text:p>
          </table:table-cell>
        </table:table-row>
        <table:table-row table:style-name="表格7.1">
          <table:table-cell table:style-name="表格7.A1" office:value-type="string">
            <text:p text:style-name="P2"/>
          </table:table-cell>
        </table:table-row>
        <table:table-row table:style-name="表格7.1">
          <table:table-cell table:style-name="表格7.A1" office:value-type="string">
            <text:p text:style-name="P2" loext:marker-style-name="T40"><text:span text:style-name="T51">Step 1</text:span><text:span text:style-name="T41">：</text:span><text:span text:style-name="T35">插入 </text:span><text:span text:style-name="T52">95</text:span><text:span text:style-name="T51"> → </text:span><text:span text:style-name="T37">放到 </text:span><text:span text:style-name="T54">index 7</text:span><text:span text:style-name="T37">（最後）</text:span></text:p>
          </table:table-cell>
        </table:table-row>
        <table:table-row table:style-name="表格7.1">
          <table:table-cell table:style-name="表格7.A1" office:value-type="string">
            <text:p text:style-name="P2" loext:marker-style-name="T40"><text:span text:style-name="T41">陣列：</text:span><text:span text:style-name="T51">[100, 90, 80, 70, 60, 50, 95]</text:span></text:p>
          </table:table-cell>
        </table:table-row>
        <table:table-row table:style-name="表格7.1">
          <table:table-cell table:style-name="表格7.A1" office:value-type="string">
            <text:p text:style-name="P2"/>
          </table:table-cell>
        </table:table-row>
        <table:table-row table:style-name="表格7.1">
          <table:table-cell table:style-name="表格7.A1" office:value-type="string">
            <text:p text:style-name="P2" loext:marker-style-name="T40"><text:span text:style-name="T51">Step 2</text:span><text:span text:style-name="T41">：</text:span><text:span text:style-name="T223">95 </text:span><text:span text:style-name="T227">的 </text:span><text:span text:style-name="T223">parent = A[7/2] = A[3]</text:span><text:span text:style-name="T51"> = 80</text:span></text:p>
          </table:table-cell>
        </table:table-row>
        <table:table-row table:style-name="表格7.1">
          <table:table-cell table:style-name="表格7.A1" office:value-type="string">
            <text:p text:style-name="P2" loext:marker-style-name="T40"><text:span text:style-name="T51"><text:s text:c="8"/></text:span><text:span text:style-name="T52">95 &gt; 80</text:span><text:span text:style-name="T51"> → </text:span><text:span text:style-name="T41">違反 </text:span><text:span text:style-name="T51">Max Heap → </text:span><text:span text:style-name="T39">交換</text:span></text:p>
          </table:table-cell>
        </table:table-row>
        <table:table-row table:style-name="表格7.1">
          <table:table-cell table:style-name="表格7.A1" office:value-type="string">
            <text:p text:style-name="P2" loext:marker-style-name="T40"><text:span text:style-name="T41">陣列：</text:span><text:span text:style-name="T51">[100, 90, </text:span><text:span text:style-name="T55">95</text:span><text:span text:style-name="T51">, 70, 60, 50, </text:span><text:span text:style-name="T55">80</text:span><text:span text:style-name="T51">]</text:span></text:p>
          </table:table-cell>
        </table:table-row>
        <table:table-row table:style-name="表格7.1">
          <table:table-cell table:style-name="表格7.A1" office:value-type="string">
            <text:p text:style-name="P2"/>
          </table:table-cell>
        </table:table-row>
        <table:table-row table:style-name="表格7.1">
          <table:table-cell table:style-name="表格7.A1" office:value-type="string">
            <text:p text:style-name="P2" loext:marker-style-name="T40"><text:span text:style-name="T51">Step 3</text:span><text:span text:style-name="T41">：</text:span><text:span text:style-name="T223">95 </text:span><text:span text:style-name="T227">的 </text:span><text:span text:style-name="T223">parent = A[3/2] = A[1]</text:span><text:span text:style-name="T51"> = 100</text:span></text:p>
          </table:table-cell>
        </table:table-row>
        <table:table-row table:style-name="表格7.1">
          <table:table-cell table:style-name="表格7.A1" office:value-type="string">
            <text:p text:style-name="P2" loext:marker-style-name="T40"><text:span text:style-name="T51"><text:s text:c="7"/></text:span><text:span text:style-name="T52"><text:s/>95 &lt; 100</text:span><text:span text:style-name="T51"> → </text:span><text:span text:style-name="T41">符合 </text:span><text:span text:style-name="T51">Max Heap → </text:span><text:span text:style-name="T39">停止</text:span></text:p>
          </table:table-cell>
        </table:table-row>
        <table:table-row table:style-name="表格7.1">
          <table:table-cell table:style-name="表格7.A1" office:value-type="string">
            <text:p text:style-name="P2"/>
          </table:table-cell>
        </table:table-row>
        <text:soft-page-break/>
        <table:table-row table:style-name="表格7.1">
          <table:table-cell table:style-name="表格7.A1" office:value-type="string">
            <text:p text:style-name="P2" loext:marker-style-name="T40"><text:span text:style-name="T41">最終結果：</text:span><text:span text:style-name="T40"/></text:p>
          </table:table-cell>
        </table:table-row>
        <table:table-row table:style-name="表格7.1">
          <table:table-cell table:style-name="表格7.A1" office:value-type="string">
            <text:p text:style-name="P2" loext:marker-style-name="T40"><text:span text:style-name="T51"><text:s text:c="8"/>100</text:span><text:span text:style-name="T40"/></text:p>
          </table:table-cell>
        </table:table-row>
        <table:table-row table:style-name="表格7.1">
          <table:table-cell table:style-name="表格7.A1" office:value-type="string">
            <text:p text:style-name="P2" loext:marker-style-name="T40"><text:span text:style-name="T51"><text:s text:c="7"/>/ <text:s text:c="2"/>\</text:span><text:span text:style-name="T40"/></text:p>
          </table:table-cell>
        </table:table-row>
        <table:table-row table:style-name="表格7.1">
          <table:table-cell table:style-name="表格7.A1" office:value-type="string">
            <text:p text:style-name="P2" loext:marker-style-name="T40"><text:span text:style-name="T51"><text:s text:c="5"/>90 <text:s text:c="3"/>95</text:span></text:p>
          </table:table-cell>
        </table:table-row>
        <table:table-row table:style-name="表格7.1">
          <table:table-cell table:style-name="表格7.A1" office:value-type="string">
            <text:p text:style-name="P43" loext:marker-style-name="T40"><text:span text:style-name="T51"><text:s text:c="5"/>/ <text:s/>\ <text:s text:c="2"/>/</text:span><text:span text:style-name="T40"> <text:s text:c="2"/>\</text:span></text:p>
          </table:table-cell>
        </table:table-row>
        <table:table-row table:style-name="表格7.1">
          <table:table-cell table:style-name="表格7.A1" office:value-type="string">
            <text:p text:style-name="P44" loext:marker-style-name="T40"><text:s/><text:span text:style-name="T51">70 <text:s/>60 50 <text:s/>80</text:span></text:p>
          </table:table-cell>
        </table:table-row>
      </table:table>
      <text:p text:style-name="P1"/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2" loext:marker-style-name="T40"><text:span text:style-name="T41">時間複雜度：</text:span><text:span text:style-name="T51">O(log n) <text:s/>← </text:span><text:span text:style-name="T41">最多往上走樹高（</text:span><text:span text:style-name="T51">h = log₂n</text:span><text:span text:style-name="T41">）步</text:span></text:p>
          </table:table-cell>
        </table:table-row>
      </table:table>
      <text:p text:style-name="P1"/>
      <text:p text:style-name="P1"/>
      <text:h text:style-name="P16" text:outline-level="2" loext:marker-style-name="T17"><text:span text:style-name="T25">3-2 </text:span><text:span text:style-name="T87">刪除最大值</text:span><text:span text:style-name="T18">（</text:span><text:span text:style-name="T25">Delete / Extract-Max</text:span><text:span text:style-name="T18">）— </text:span><text:span text:style-name="T25">Heapify</text:span><text:span text:style-name="T18">（向下沉）</text:span></text:h>
      <text:p text:style-name="P32" loext:marker-style-name="T27"><text:span text:style-name="T28">步驟：</text:span><text:span text:style-name="T27"/></text:p>
      <text:list xml:id="list83242733369351" text:continue-list="list83242008581833" text:style-name="WWNum10">
        <text:list-item>
          <text:p text:style-name="P24" loext:marker-style-name="T33"><text:span text:style-name="T57">Step 1</text:span><text:span text:style-name="T34">：</text:span><text:span text:style-name="T152">取出 </text:span><text:span text:style-name="T156">Root</text:span><text:span text:style-name="T152">（最大值）</text:span><text:span text:style-name="T34">。</text:span></text:p>
        </text:list-item>
        <text:list-item text:style-override="WWNum11">
          <text:p text:style-name="P25" loext:marker-style-name="T33"><text:span text:style-name="T57">Step 2</text:span><text:span text:style-name="T34">：</text:span><text:span text:style-name="T122">將陣列最後一個元素移到 </text:span><text:span text:style-name="T127">Root </text:span><text:span text:style-name="T122">位置。</text:span></text:p>
        </text:list-item>
        <text:list-item text:style-override="WWNum12">
          <text:p text:style-name="P26" loext:marker-style-name="T33"><text:span text:style-name="T57">Step 3</text:span><text:span text:style-name="T34">：</text:span><text:span text:style-name="T144">與兩個子節點中</text:span><text:span text:style-name="T162">較大的</text:span><text:span text:style-name="T144">比較</text:span><text:span text:style-name="T34">，若違反 </text:span><text:span text:style-name="T57">Heap Property</text:span><text:span text:style-name="T34">，則交換。</text:span></text:p>
        </text:list-item>
        <text:list-item text:style-override="WWNum13">
          <text:p text:style-name="P27" loext:marker-style-name="T33"><text:span text:style-name="T57">Step 4</text:span><text:span text:style-name="T34">：重複 </text:span><text:span text:style-name="T57">Step 3</text:span><text:span text:style-name="T34">（</text:span><text:span text:style-name="T57">Heapify / Bubble Down</text:span><text:span text:style-name="T34">），一路往下，直到滿足條件或抵達葉節點。</text:span></text:p>
        </text:list-item>
      </text:list>
      <text:p text:style-name="P1"/>
      <text:p text:style-name="P34" loext:marker-style-name="T7"><text:span text:style-name="T8">完整範例：</text:span><text:span text:style-name="T12">Max Heap </text:span><text:span text:style-name="T8">刪除 </text:span><text:span text:style-name="T12">Root</text:span>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2" loext:marker-style-name="T40"><text:span text:style-name="T41">原始 </text:span><text:span text:style-name="T51">Max Heap</text:span><text:span text:style-name="T41">：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40"><text:span text:style-name="T51"><text:s text:c="9"/>100</text:span><text:span text:style-name="T40"/></text:p>
          </table:table-cell>
        </table:table-row>
        <table:table-row table:style-name="表格9.1">
          <table:table-cell table:style-name="表格9.A1" office:value-type="string">
            <text:p text:style-name="P2" loext:marker-style-name="T40"><text:span text:style-name="T51"><text:s text:c="8"/>/ <text:s text:c="2"/>\</text:span><text:span text:style-name="T40"/></text:p>
          </table:table-cell>
        </table:table-row>
        <table:table-row table:style-name="表格9.1">
          <table:table-cell table:style-name="表格9.A1" office:value-type="string">
            <text:p text:style-name="P2" loext:marker-style-name="T40"><text:span text:style-name="T51"><text:s text:c="7"/>90 <text:s text:c="3"/>80</text:span><text:span text:style-name="T40"/></text:p>
          </table:table-cell>
        </table:table-row>
        <table:table-row table:style-name="表格9.1">
          <table:table-cell table:style-name="表格9.A1" office:value-type="string">
            <text:p text:style-name="P2" loext:marker-style-name="T40"><text:span text:style-name="T51"><text:s text:c="6"/>/ \ <text:s text:c="2"/>/</text:span><text:span text:style-name="T40"/></text:p>
          </table:table-cell>
        </table:table-row>
        <table:table-row table:style-name="表格9.1">
          <table:table-cell table:style-name="表格9.A1" office:value-type="string">
            <text:p text:style-name="P2" loext:marker-style-name="T40"><text:span text:style-name="T51"><text:s/>70 <text:s/>60 <text:s/>50</text:span><text:span text:style-name="T40"/></text:p>
          </table:table-cell>
        </table:table-row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40"><text:span text:style-name="T51">Step 1</text:span><text:span text:style-name="T41">：取出 </text:span><text:span text:style-name="T51">Root = 100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40"><text:span text:style-name="T51">Step 2</text:span><text:span text:style-name="T41">：把最後元素 </text:span><text:span text:style-name="T51">50 </text:span><text:span text:style-name="T41">移到 </text:span><text:span text:style-name="T51">Root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40"><text:span text:style-name="T51"><text:s text:c="9"/>50</text:span><text:span text:style-name="T40"/></text:p>
          </table:table-cell>
        </table:table-row>
        <table:table-row table:style-name="表格9.1">
          <table:table-cell table:style-name="表格9.A1" office:value-type="string">
            <text:p text:style-name="P2" loext:marker-style-name="T40"><text:span text:style-name="T51"><text:s text:c="8"/>/ <text:s/>\</text:span><text:span text:style-name="T40"/></text:p>
          </table:table-cell>
        </table:table-row>
        <table:table-row table:style-name="表格9.1">
          <table:table-cell table:style-name="表格9.A1" office:value-type="string">
            <text:p text:style-name="P2" loext:marker-style-name="T40"><text:span text:style-name="T51"><text:s text:c="7"/>90 <text:s text:c="2"/>80</text:span><text:span text:style-name="T40"/></text:p>
          </table:table-cell>
        </table:table-row>
        <table:table-row table:style-name="表格9.1">
          <table:table-cell table:style-name="表格9.A1" office:value-type="string">
            <text:p text:style-name="P2" loext:marker-style-name="T40"><text:span text:style-name="T51"><text:s text:c="6"/>/ \</text:span><text:span text:style-name="T40"/></text:p>
          </table:table-cell>
        </table:table-row>
        <table:table-row table:style-name="表格9.1">
          <table:table-cell table:style-name="表格9.A1" office:value-type="string">
            <text:p text:style-name="P2" loext:marker-style-name="T40"><text:span text:style-name="T51"><text:s text:c="4"/>70 <text:s/>60</text:span><text:span text:style-name="T40"/></text:p>
          </table:table-cell>
        </table:table-row>
        <text:soft-page-break/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40"><text:span text:style-name="T51">Step 3</text:span><text:span text:style-name="T41">：</text:span><text:span text:style-name="T51">50 </text:span><text:span text:style-name="T41">的子節點 </text:span><text:span text:style-name="T51">90</text:span><text:span text:style-name="T41">、</text:span><text:span text:style-name="T51">80</text:span><text:span text:style-name="T41">，較大為 </text:span><text:span text:style-name="T51">90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40"><text:span text:style-name="T51"><text:s text:c="8"/>50 &lt; 90 → </text:span><text:span text:style-name="T41">交換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40"><text:span text:style-name="T51"><text:s text:c="9"/>90</text:span><text:span text:style-name="T40"/></text:p>
          </table:table-cell>
        </table:table-row>
        <table:table-row table:style-name="表格9.1">
          <table:table-cell table:style-name="表格9.A1" office:value-type="string">
            <text:p text:style-name="P2" loext:marker-style-name="T40"><text:span text:style-name="T51"><text:s text:c="8"/>/ <text:s/>\</text:span><text:span text:style-name="T40"/></text:p>
          </table:table-cell>
        </table:table-row>
        <table:table-row table:style-name="表格9.1">
          <table:table-cell table:style-name="表格9.A1" office:value-type="string">
            <text:p text:style-name="P2" loext:marker-style-name="T40"><text:span text:style-name="T51"><text:s text:c="7"/>50 <text:s text:c="2"/>80</text:span><text:span text:style-name="T40"/></text:p>
          </table:table-cell>
        </table:table-row>
        <table:table-row table:style-name="表格9.1">
          <table:table-cell table:style-name="表格9.A1" office:value-type="string">
            <text:p text:style-name="P2" loext:marker-style-name="T40"><text:span text:style-name="T51"><text:s text:c="6"/>/ \</text:span><text:span text:style-name="T40"/></text:p>
          </table:table-cell>
        </table:table-row>
        <table:table-row table:style-name="表格9.1">
          <table:table-cell table:style-name="表格9.A1" office:value-type="string">
            <text:p text:style-name="P2" loext:marker-style-name="T40"><text:span text:style-name="T51"><text:s text:c="4"/>70 <text:s/>60</text:span><text:span text:style-name="T40"/></text:p>
          </table:table-cell>
        </table:table-row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40"><text:span text:style-name="T51">Step 4</text:span><text:span text:style-name="T41">：</text:span><text:span text:style-name="T51">50 </text:span><text:span text:style-name="T41">的子節點 </text:span><text:span text:style-name="T51">70</text:span><text:span text:style-name="T41">、</text:span><text:span text:style-name="T51">60</text:span><text:span text:style-name="T41">，較大為 </text:span><text:span text:style-name="T51">70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40"><text:span text:style-name="T51"><text:s text:c="8"/>50 &lt; 70 → </text:span><text:span text:style-name="T41">交換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40"><text:span text:style-name="T51"><text:s text:c="9"/>90</text:span><text:span text:style-name="T40"/></text:p>
          </table:table-cell>
        </table:table-row>
        <table:table-row table:style-name="表格9.1">
          <table:table-cell table:style-name="表格9.A1" office:value-type="string">
            <text:p text:style-name="P2" loext:marker-style-name="T40"><text:span text:style-name="T51"><text:s text:c="8"/>/ <text:s/>\</text:span><text:span text:style-name="T40"/></text:p>
          </table:table-cell>
        </table:table-row>
        <table:table-row table:style-name="表格9.1">
          <table:table-cell table:style-name="表格9.A1" office:value-type="string">
            <text:p text:style-name="P2" loext:marker-style-name="T40"><text:span text:style-name="T51"><text:s text:c="7"/>70 <text:s text:c="2"/>80</text:span><text:span text:style-name="T40"/></text:p>
          </table:table-cell>
        </table:table-row>
        <table:table-row table:style-name="表格9.1">
          <table:table-cell table:style-name="表格9.A1" office:value-type="string">
            <text:p text:style-name="P2" loext:marker-style-name="T40"><text:span text:style-name="T51"><text:s text:c="6"/>/ \</text:span><text:span text:style-name="T40"/></text:p>
          </table:table-cell>
        </table:table-row>
        <table:table-row table:style-name="表格9.1">
          <table:table-cell table:style-name="表格9.A1" office:value-type="string">
            <text:p text:style-name="P2" loext:marker-style-name="T40"><text:span text:style-name="T51"><text:s text:c="3"/>50 <text:s/>60</text:span><text:span text:style-name="T40"/></text:p>
          </table:table-cell>
        </table:table-row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40"><text:span text:style-name="T51">Step 5</text:span><text:span text:style-name="T41">：</text:span><text:span text:style-name="T51">50 </text:span><text:span text:style-name="T41">已是葉節點 → 停止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40"><text:span text:style-name="T41">最終陣列：</text:span><text:span text:style-name="T51">[90, 70, 80, 50, 60]</text:span></text:p>
          </table:table-cell>
        </table:table-row>
      </table:table>
      <text:p text:style-name="P1"/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2" loext:marker-style-name="T40"><text:span text:style-name="T41">時間複雜度：</text:span><text:span text:style-name="T51">O(log n) <text:s/>← </text:span><text:span text:style-name="T41">最多往下走樹高（</text:span><text:span text:style-name="T51">h = log₂n</text:span><text:span text:style-name="T41">）步</text:span></text:p>
          </table:table-cell>
        </table:table-row>
      </table:table>
      <text:p text:style-name="P1"/>
      <text:p text:style-name="P1"/>
      <text:h text:style-name="P13" text:outline-level="1" loext:marker-style-name="T3"><text:span text:style-name="T4">四、建立 </text:span><text:span text:style-name="T11">Heap</text:span><text:span text:style-name="T4">（</text:span><text:span text:style-name="T10">Build Heap</text:span><text:span text:style-name="T4">）</text:span></text:h>
      <text:h text:style-name="P16" text:outline-level="2" loext:marker-style-name="T17"><text:span text:style-name="T18">方法 </text:span><text:span text:style-name="T26">A</text:span><text:span text:style-name="T18">：逐個插入法</text:span></text:h>
      <text:p text:style-name="P32" loext:marker-style-name="T29"><text:span text:style-name="T30">從</text:span><text:span text:style-name="T88">空</text:span><text:span text:style-name="T30"> </text:span><text:span text:style-name="T47">Heap</text:span><text:span text:style-name="T50"> </text:span><text:span text:style-name="T30">開始，呼叫 </text:span><text:span text:style-name="T106">n </text:span><text:span text:style-name="T108">次 </text:span><text:span text:style-name="T106">Insert</text:span><text:span text:style-name="T30">，每次 </text:span><text:span text:style-name="T159">O(log n)</text:span><text:span text:style-name="T30">。</text:span>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2" loext:marker-style-name="T40"><text:span text:style-name="T58">總時間：</text:span><text:span text:style-name="T142">n × O(log n)</text:span><text:span text:style-name="T51"> = O(n log n)</text:span></text:p>
          </table:table-cell>
        </table:table-row>
      </table:table>
      <text:p text:style-name="P1"/>
      <text:h text:style-name="P16" text:outline-level="2" loext:marker-style-name="T17"><text:span text:style-name="T18">方法 </text:span><text:span text:style-name="T26">B</text:span><text:span text:style-name="T18">：</text:span><text:span text:style-name="T25">Bottom-Up Build Heap</text:span><text:span text:style-name="T18">（</text:span><text:span text:style-name="T25">Floyd</text:span><text:span text:style-name="T26"> </text:span><text:span text:style-name="T18">演算法）★考試重點★</text:span></text:h>
      <text:p text:style-name="P32" loext:marker-style-name="T29"><text:span text:style-name="T30">直接</text:span><text:span text:style-name="T163">將 </text:span><text:span text:style-name="T166">n </text:span><text:span text:style-name="T163">個元素放入陣列</text:span><text:span text:style-name="T30">，從</text:span><text:span text:style-name="T88">最後一個非葉節點（</text:span><text:span text:style-name="T97">index = ⌊n/2⌋</text:span><text:span text:style-name="T88">）開始</text:span><text:span text:style-name="T30">，</text:span><text:span text:style-name="T145">由下往上</text:span><text:span text:style-name="T30">逐一執行 </text:span><text:span text:style-name="T50">Heapify</text:span><text:span text:style-name="T30">。</text:span></text:p>
      <text:p text:style-name="P1"><text:soft-page-break/>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2" loext:marker-style-name="T168"><text:span text:style-name="T168">★ </text:span><text:span text:style-name="T169">為何從 ⌊</text:span><text:span text:style-name="T168">n/2⌋ </text:span><text:span text:style-name="T169">開始？</text:span></text:p>
          </table:table-cell>
        </table:table-row>
        <table:table-row table:style-name="表格12.1">
          <table:table-cell table:style-name="表格12.A1" office:value-type="string">
            <text:p text:style-name="P2" loext:marker-style-name="T40"><text:span text:style-name="T91">index &gt; ⌊n/2⌋ </text:span><text:span text:style-name="T92">的節點全部都是葉節點</text:span><text:span text:style-name="T58">（</text:span><text:span text:style-name="T74">無子節點</text:span><text:span text:style-name="T58">），</text:span></text:p>
          </table:table-cell>
        </table:table-row>
        <table:table-row table:style-name="表格12.1">
          <table:table-cell table:style-name="表格12.A1" office:value-type="string">
            <text:p text:style-name="P2" loext:marker-style-name="T40"><text:span text:style-name="T58">葉節點本身已滿足 </text:span><text:span text:style-name="T51">Heap Property(</text:span><text:span text:style-name="T142">Heap Property</text:span><text:span text:style-name="T143">就是比較父節點</text:span><text:span text:style-name="T142">vs</text:span><text:span text:style-name="T143">子節點</text:span><text:span text:style-name="T58">；</text:span><text:span text:style-name="T157">葉節點沒有孩子 → 沒有東西可以比較 </text:span><text:span text:style-name="T41">→ 一定合法</text:span><text:span text:style-name="T58">。</text:span><text:span text:style-name="T51">)</text:span><text:span text:style-name="T58">，不需要 </text:span><text:span text:style-name="T51">Heapify</text:span><text:span text:style-name="T58">。</text:span></text:p>
          </table:table-cell>
        </table:table-row>
        <table:table-row table:style-name="表格12.1">
          <table:table-cell table:style-name="表格12.A1" office:value-type="string">
            <text:p text:style-name="P2" loext:marker-style-name="T40"><text:span text:style-name="T58">因此</text:span><text:span text:style-name="T128">只需從 </text:span><text:span text:style-name="T127">index ⌊n/2⌋ </text:span><text:span text:style-name="T128">往 </text:span><text:span text:style-name="T127">index 1 </text:span><text:span text:style-name="T128">逐一執行</text:span><text:span text:style-name="T58">。</text:span></text:p>
          </table:table-cell>
        </table:table-row>
      </table:table>
      <text:p text:style-name="P1"/>
      <text:p text:style-name="P32" loext:marker-style-name="T29"><text:span text:style-name="T31">範例：將 </text:span><text:span text:style-name="T48">[50, 30, 80, 10, 20, 70, 90] </text:span><text:span text:style-name="T31">建成 </text:span><text:span text:style-name="T48">Max Heap</text:span></text:p>
      <text:p text:style-name="P1"/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2" loext:marker-style-name="T40"><text:span text:style-name="T58">初始陣列（</text:span><text:span text:style-name="T51">index </text:span><text:span text:style-name="T58">從 </text:span><text:span text:style-name="T51">1 </text:span><text:span text:style-name="T58">開始）：</text:span></text:p>
          </table:table-cell>
        </table:table-row>
        <table:table-row table:style-name="表格13.1">
          <table:table-cell table:style-name="表格13.A1" office:value-type="string">
            <text:p text:style-name="P2" loext:marker-style-name="T40"><text:span text:style-name="T51">index</text:span><text:span text:style-name="T58">： <text:s/></text:span><text:span text:style-name="T51">1 <text:s text:c="3"/>2 <text:s text:c="3"/>3 <text:s text:c="3"/>4 <text:s text:c="3"/>5 <text:s text:c="3"/>6 <text:s text:c="3"/>7</text:span></text:p>
          </table:table-cell>
        </table:table-row>
        <table:table-row table:style-name="表格13.1">
          <table:table-cell table:style-name="表格13.A1" office:value-type="string">
            <text:p text:style-name="P2" loext:marker-style-name="T40"><text:span text:style-name="T51">value</text:span><text:span text:style-name="T58">： <text:s/></text:span><text:span text:style-name="T51">50 <text:s text:c="2"/>30 <text:s text:c="2"/>80 <text:s text:c="2"/>10 <text:s text:c="2"/>20 <text:s text:c="2"/>70 <text:s text:c="2"/>90</text:span></text:p>
          </table:table-cell>
        </table:table-row>
        <table:table-row table:style-name="表格13.1">
          <table:table-cell table:style-name="表格13.A1" office:value-type="string">
            <text:p text:style-name="P2"/>
          </table:table-cell>
        </table:table-row>
        <table:table-row table:style-name="表格13.1">
          <table:table-cell table:style-name="表格13.A1" office:value-type="string">
            <text:p text:style-name="P2" loext:marker-style-name="T40"><text:span text:style-name="T52">n = 7</text:span><text:span text:style-name="T58">，</text:span><text:span text:style-name="T76">最後非葉節點 </text:span><text:span text:style-name="T77">index = ⌊7/2⌋ = 3</text:span></text:p>
          </table:table-cell>
        </table:table-row>
        <table:table-row table:style-name="表格13.1">
          <table:table-cell table:style-name="表格13.A1" office:value-type="string">
            <text:p text:style-name="P2" loext:marker-style-name="T40"><text:span text:style-name="T58">（</text:span><text:span text:style-name="T93">index 4</text:span><text:span text:style-name="T94">、</text:span><text:span text:style-name="T93">5</text:span><text:span text:style-name="T94">、</text:span><text:span text:style-name="T93">6</text:span><text:span text:style-name="T94">、</text:span><text:span text:style-name="T93">7 </text:span><text:span text:style-name="T94">皆為葉節點</text:span><text:span text:style-name="T58">，不需 </text:span><text:span text:style-name="T51">Heapify</text:span><text:span text:style-name="T58">）</text:span></text:p>
          </table:table-cell>
        </table:table-row>
        <table:table-row table:style-name="表格13.1">
          <table:table-cell table:style-name="表格13.A1" office:value-type="string">
            <text:p text:style-name="P2"/>
          </table:table-cell>
        </table:table-row>
        <table:table-row table:style-name="表格13.1">
          <table:table-cell table:style-name="表格13.A1" office:value-type="string">
            <text:p text:style-name="P2" loext:marker-style-name="T40"><text:span text:style-name="T58">初始樹狀結構：</text:span><text:span text:style-name="T40"/></text:p>
          </table:table-cell>
        </table:table-row>
        <table:table-row table:style-name="表格13.1">
          <table:table-cell table:style-name="表格13.A1" office:value-type="string">
            <text:p text:style-name="P2" loext:marker-style-name="T40"><text:span text:style-name="T51"><text:s text:c="13"/>50</text:span><text:span text:style-name="T40"/></text:p>
          </table:table-cell>
        </table:table-row>
        <table:table-row table:style-name="表格13.1">
          <table:table-cell table:style-name="表格13.A1" office:value-type="string">
            <text:p text:style-name="P2" loext:marker-style-name="T40"><text:span text:style-name="T51"><text:s text:c="12"/>/ <text:s/>\</text:span><text:span text:style-name="T40"/></text:p>
          </table:table-cell>
        </table:table-row>
        <table:table-row table:style-name="表格13.1">
          <table:table-cell table:style-name="表格13.A1" office:value-type="string">
            <text:p text:style-name="P2" loext:marker-style-name="T40"><text:span text:style-name="T51"><text:s text:c="8"/>30 <text:s text:c="3"/>80</text:span><text:span text:style-name="T40"/></text:p>
          </table:table-cell>
        </table:table-row>
        <table:table-row table:style-name="表格13.1">
          <table:table-cell table:style-name="表格13.A1" office:value-type="string">
            <text:p text:style-name="P2" loext:marker-style-name="T40"><text:span text:style-name="T51"><text:s text:c="7"/>/ \ <text:s text:c="6"/>/ \</text:span><text:span text:style-name="T40"/></text:p>
          </table:table-cell>
        </table:table-row>
        <table:table-row table:style-name="表格13.1">
          <table:table-cell table:style-name="表格13.A1" office:value-type="string">
            <text:p text:style-name="P2" loext:marker-style-name="T40"><text:span text:style-name="T51"><text:s text:c="3"/>10 <text:s/>20 70 <text:s/>90</text:span><text:span text:style-name="T40"/></text:p>
          </table:table-cell>
        </table:table-row>
      </table:table>
      <text:p text:style-name="P1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2" loext:marker-style-name="T40"><text:span text:style-name="T51">→ Heapify(3)</text:span><text:span text:style-name="T58">：</text:span><text:span text:style-name="T51">index 3 = 80</text:span></text:p>
          </table:table-cell>
        </table:table-row>
        <table:table-row table:style-name="表格14.1">
          <table:table-cell table:style-name="表格14.A1" office:value-type="string">
            <text:p text:style-name="P2" loext:marker-style-name="T40"><text:span text:style-name="T51"><text:s text:c="2"/></text:span><text:span text:style-name="T58">子節點：</text:span><text:span text:style-name="T51">index 6 = 70</text:span><text:span text:style-name="T58">，</text:span><text:span text:style-name="T51">index 7 = 90</text:span></text:p>
          </table:table-cell>
        </table:table-row>
        <table:table-row table:style-name="表格14.1">
          <table:table-cell table:style-name="表格14.A1" office:value-type="string">
            <text:p text:style-name="P2" loext:marker-style-name="T40"><text:span text:style-name="T51"><text:s text:c="2"/></text:span><text:span text:style-name="T55">Max Heap </text:span><text:span text:style-name="T56">要求父 ≥ 子</text:span><text:span text:style-name="T58">，但 </text:span><text:span text:style-name="T51">80 &lt; 90 → </text:span><text:span text:style-name="T58">違反！</text:span></text:p>
          </table:table-cell>
        </table:table-row>
        <table:table-row table:style-name="表格14.1">
          <table:table-cell table:style-name="表格14.A1" office:value-type="string">
            <text:p text:style-name="P2" loext:marker-style-name="T40"><text:span text:style-name="T51"><text:s text:c="2"/>80 </text:span><text:span text:style-name="T58">與 </text:span><text:span text:style-name="T51">90 </text:span><text:span text:style-name="T58">交換</text:span></text:p>
          </table:table-cell>
        </table:table-row>
        <table:table-row table:style-name="表格14.1">
          <table:table-cell table:style-name="表格14.A1" office:value-type="string">
            <text:p text:style-name="P2"/>
          </table:table-cell>
        </table:table-row>
        <table:table-row table:style-name="表格14.1">
          <table:table-cell table:style-name="表格14.A1" office:value-type="string">
            <text:p text:style-name="P2" loext:marker-style-name="T40"><text:span text:style-name="T51"><text:s text:c="2"/></text:span><text:span text:style-name="T58">交換後：</text:span></text:p>
          </table:table-cell>
        </table:table-row>
        <table:table-row table:style-name="表格14.1">
          <table:table-cell table:style-name="表格14.A1" office:value-type="string">
            <text:p text:style-name="P2" loext:marker-style-name="T40"><text:span text:style-name="T51"><text:s text:c="13"/>50</text:span><text:span text:style-name="T40"/></text:p>
          </table:table-cell>
        </table:table-row>
        <table:table-row table:style-name="表格14.1">
          <table:table-cell table:style-name="表格14.A1" office:value-type="string">
            <text:p text:style-name="P2" loext:marker-style-name="T40"><text:span text:style-name="T51"><text:s text:c="13"/>/ <text:s/>\</text:span><text:span text:style-name="T40"/></text:p>
          </table:table-cell>
        </table:table-row>
        <table:table-row table:style-name="表格14.1">
          <table:table-cell table:style-name="表格14.A1" office:value-type="string">
            <text:p text:style-name="P2" loext:marker-style-name="T40"><text:span text:style-name="T51"><text:s text:c="8"/>30 <text:s text:c="3"/>90 <text:s text:c="5"/>← 90 </text:span><text:span text:style-name="T58">上來了</text:span></text:p>
          </table:table-cell>
        </table:table-row>
        <text:soft-page-break/>
        <table:table-row table:style-name="表格14.1">
          <table:table-cell table:style-name="表格14.A1" office:value-type="string">
            <text:p text:style-name="P2" loext:marker-style-name="T40"><text:span text:style-name="T51"><text:s text:c="5"/>/ \ <text:s text:c="6"/>/ \</text:span><text:span text:style-name="T40"/></text:p>
          </table:table-cell>
        </table:table-row>
        <table:table-row table:style-name="表格14.1">
          <table:table-cell table:style-name="表格14.A1" office:value-type="string">
            <text:p text:style-name="P2" loext:marker-style-name="T40"><text:span text:style-name="T51"><text:s/>10 <text:s/>20 70 <text:s/>80</text:span><text:span text:style-name="T40"/></text:p>
          </table:table-cell>
        </table:table-row>
        <table:table-row table:style-name="表格14.1">
          <table:table-cell table:style-name="表格14.A1" office:value-type="string">
            <text:p text:style-name="P2"/>
          </table:table-cell>
        </table:table-row>
        <table:table-row table:style-name="表格14.1">
          <table:table-cell table:style-name="表格14.A1" office:value-type="string">
            <text:p text:style-name="P2" loext:marker-style-name="T40"><text:span text:style-name="T51"><text:s text:c="2"/></text:span><text:span text:style-name="T58">陣列：</text:span><text:span text:style-name="T51">[50, 30, 90, 10, 20, 70, 80]</text:span></text:p>
          </table:table-cell>
        </table:table-row>
        <table:table-row table:style-name="表格14.1">
          <table:table-cell table:style-name="表格14.A1" office:value-type="string">
            <text:p text:style-name="P2" loext:marker-style-name="T40"><text:span text:style-name="T51"><text:s text:c="2"/>80 </text:span><text:span text:style-name="T58">已是葉節點 → 停止</text:span></text:p>
          </table:table-cell>
        </table:table-row>
      </table:table>
      <text:p text:style-name="P1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2" loext:marker-style-name="T40"><text:span text:style-name="T51">→ Heapify(2)</text:span><text:span text:style-name="T58">：</text:span><text:span text:style-name="T51">index 2 = 30</text:span></text:p>
          </table:table-cell>
        </table:table-row>
        <table:table-row table:style-name="表格15.1">
          <table:table-cell table:style-name="表格15.A1" office:value-type="string">
            <text:p text:style-name="P2" loext:marker-style-name="T40"><text:span text:style-name="T51"><text:s text:c="2"/></text:span><text:span text:style-name="T58">子節點：</text:span><text:span text:style-name="T51">index 4 = 10</text:span><text:span text:style-name="T58">，</text:span><text:span text:style-name="T51">index 5 = 20</text:span></text:p>
          </table:table-cell>
        </table:table-row>
        <table:table-row table:style-name="表格15.1">
          <table:table-cell table:style-name="表格15.A1" office:value-type="string">
            <text:p text:style-name="P2" loext:marker-style-name="T40"><text:span text:style-name="T51"><text:s text:c="2"/>30 ≥ 20 </text:span><text:span text:style-name="T58">且 </text:span><text:span text:style-name="T51">30 ≥ 10 → </text:span><text:span text:style-name="T58">符合 </text:span><text:span text:style-name="T51">Max Heap → </text:span><text:span text:style-name="T58">無需交換</text:span></text:p>
          </table:table-cell>
        </table:table-row>
        <table:table-row table:style-name="表格15.1">
          <table:table-cell table:style-name="表格15.A1" office:value-type="string">
            <text:p text:style-name="P2"/>
          </table:table-cell>
        </table:table-row>
        <table:table-row table:style-name="表格15.1">
          <table:table-cell table:style-name="表格15.A1" office:value-type="string">
            <text:p text:style-name="P2" loext:marker-style-name="T40"><text:span text:style-name="T51"><text:s text:c="2"/></text:span><text:span text:style-name="T58">樹狀結構不變：</text:span></text:p>
          </table:table-cell>
        </table:table-row>
        <table:table-row table:style-name="表格15.1">
          <table:table-cell table:style-name="表格15.A1" office:value-type="string">
            <text:p text:style-name="P2" loext:marker-style-name="T40"><text:span text:style-name="T51"><text:s text:c="11"/>50</text:span><text:span text:style-name="T40"/></text:p>
          </table:table-cell>
        </table:table-row>
        <table:table-row table:style-name="表格15.1">
          <table:table-cell table:style-name="表格15.A1" office:value-type="string">
            <text:p text:style-name="P2" loext:marker-style-name="T40"><text:span text:style-name="T51"><text:s text:c="10"/>/ <text:s/>\</text:span><text:span text:style-name="T40"/></text:p>
          </table:table-cell>
        </table:table-row>
        <table:table-row table:style-name="表格15.1">
          <table:table-cell table:style-name="表格15.A1" office:value-type="string">
            <text:p text:style-name="P2" loext:marker-style-name="T40"><text:span text:style-name="T51"><text:s text:c="8"/>30 <text:s text:c="3"/>90</text:span><text:span text:style-name="T40"/></text:p>
          </table:table-cell>
        </table:table-row>
        <table:table-row table:style-name="表格15.1">
          <table:table-cell table:style-name="表格15.A1" office:value-type="string">
            <text:p text:style-name="P2" loext:marker-style-name="T40"><text:span text:style-name="T51"><text:s text:c="7"/>/ \ <text:s text:c="2"/>/ \</text:span><text:span text:style-name="T40"/></text:p>
          </table:table-cell>
        </table:table-row>
        <table:table-row table:style-name="表格15.1">
          <table:table-cell table:style-name="表格15.A1" office:value-type="string">
            <text:p text:style-name="P2" loext:marker-style-name="T40"><text:span text:style-name="T51"><text:s text:c="5"/>10 <text:s/>20 70 <text:s/>80</text:span><text:span text:style-name="T40"/></text:p>
          </table:table-cell>
        </table:table-row>
        <table:table-row table:style-name="表格15.1">
          <table:table-cell table:style-name="表格15.A1" office:value-type="string">
            <text:p text:style-name="P2"/>
          </table:table-cell>
        </table:table-row>
        <table:table-row table:style-name="表格15.1">
          <table:table-cell table:style-name="表格15.A1" office:value-type="string">
            <text:p text:style-name="P2" loext:marker-style-name="T40"><text:span text:style-name="T51"><text:s text:c="2"/></text:span><text:span text:style-name="T58">陣列：</text:span><text:span text:style-name="T51">[50, 30, 90, 10, 20, 70, 80]</text:span></text:p>
          </table:table-cell>
        </table:table-row>
      </table:table>
      <text:p text:style-name="P1"/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2" loext:marker-style-name="T40"><text:span text:style-name="T51">→ Heapify(1)</text:span><text:span text:style-name="T58">：</text:span><text:span text:style-name="T51">index 1 = 50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40"><text:span text:style-name="T51"><text:s text:c="2"/></text:span><text:span text:style-name="T58">子節點：</text:span><text:span text:style-name="T51">index 2 = 30</text:span><text:span text:style-name="T58">，</text:span><text:span text:style-name="T51">index 3 = 90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40"><text:span text:style-name="T51"><text:s text:c="2"/></text:span><text:span text:style-name="T92">較大子節點</text:span><text:span text:style-name="T58">為 </text:span><text:span text:style-name="T51">90 &gt; 50 → </text:span><text:span text:style-name="T52">50 </text:span><text:span text:style-name="T53">與 </text:span><text:span text:style-name="T52">90 </text:span><text:span text:style-name="T53">交換</text:span></text:p>
          </table:table-cell>
        </table:table-row>
        <table:table-row table:style-name="表格16.1">
          <table:table-cell table:style-name="表格16.A1" office:value-type="string">
            <text:p text:style-name="P2"/>
          </table:table-cell>
        </table:table-row>
        <table:table-row table:style-name="表格16.1">
          <table:table-cell table:style-name="表格16.A1" office:value-type="string">
            <text:p text:style-name="P2" loext:marker-style-name="T40"><text:span text:style-name="T51"><text:s text:c="2"/></text:span><text:span text:style-name="T58">第 </text:span><text:span text:style-name="T51">1 </text:span><text:span text:style-name="T58">步交換後：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40"><text:span text:style-name="T51"><text:s text:c="11"/>90</text:span><text:span text:style-name="T40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40"><text:span text:style-name="T51"><text:s text:c="10"/>/ <text:s/>\</text:span><text:span text:style-name="T40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40"><text:span text:style-name="T51"><text:s text:c="8"/>30 <text:s text:c="3"/>50 <text:s text:c="5"/>← 50 </text:span><text:span text:style-name="T58">下沉到 </text:span><text:span text:style-name="T51">index 3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40"><text:span text:style-name="T51"><text:s text:c="7"/>/ \ <text:s text:c="2"/>/ \</text:span><text:span text:style-name="T40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40"><text:span text:style-name="T51"><text:s text:c="5"/>10 <text:s/>20 70 <text:s/>80</text:span><text:span text:style-name="T40"/></text:p>
          </table:table-cell>
        </table:table-row>
        <table:table-row table:style-name="表格16.1">
          <table:table-cell table:style-name="表格16.A1" office:value-type="string">
            <text:p text:style-name="P2"/>
          </table:table-cell>
        </table:table-row>
        <table:table-row table:style-name="表格16.1">
          <table:table-cell table:style-name="表格16.A1" office:value-type="string">
            <text:p text:style-name="P2" loext:marker-style-name="T40"><text:span text:style-name="T51"><text:s text:c="2"/></text:span><text:span text:style-name="T58">陣列：</text:span><text:span text:style-name="T51">[90, 30, 50, 10, 20, 70, 80]</text:span></text:p>
          </table:table-cell>
        </table:table-row>
        <text:soft-page-break/>
        <table:table-row table:style-name="表格16.1">
          <table:table-cell table:style-name="表格16.A1" office:value-type="string">
            <text:p text:style-name="P2"/>
          </table:table-cell>
        </table:table-row>
        <table:table-row table:style-name="表格16.1">
          <table:table-cell table:style-name="表格16.A1" office:value-type="string">
            <text:p text:style-name="P2" loext:marker-style-name="T40"><text:span text:style-name="T51"><text:s text:c="2"/></text:span><text:span text:style-name="T156">50 </text:span><text:span text:style-name="T157">繼續下沉</text:span><text:span text:style-name="T58">：子節點 </text:span><text:span text:style-name="T51">index 6 = 70</text:span><text:span text:style-name="T58">，</text:span><text:span text:style-name="T51">index 7 = 80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40"><text:span text:style-name="T51"><text:s text:c="2"/></text:span><text:span text:style-name="T92">較大子節點</text:span><text:span text:style-name="T58">為 </text:span><text:span text:style-name="T51">80 &gt; 50 → 50 </text:span><text:span text:style-name="T58">與 </text:span><text:span text:style-name="T51">80 </text:span><text:span text:style-name="T58">交換</text:span></text:p>
          </table:table-cell>
        </table:table-row>
        <table:table-row table:style-name="表格16.1">
          <table:table-cell table:style-name="表格16.A1" office:value-type="string">
            <text:p text:style-name="P2"/>
          </table:table-cell>
        </table:table-row>
        <table:table-row table:style-name="表格16.1">
          <table:table-cell table:style-name="表格16.A1" office:value-type="string">
            <text:p text:style-name="P2" loext:marker-style-name="T40"><text:span text:style-name="T51"><text:s text:c="2"/></text:span><text:span text:style-name="T58">第 </text:span><text:span text:style-name="T51">2 </text:span><text:span text:style-name="T58">步交換後：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40"><text:span text:style-name="T51"><text:s text:c="11"/>90</text:span><text:span text:style-name="T40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40"><text:span text:style-name="T51"><text:s text:c="10"/>/ <text:s/>\</text:span><text:span text:style-name="T40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40"><text:span text:style-name="T51"><text:s text:c="8"/>30 <text:s text:c="3"/>80 <text:s text:c="5"/>← 80 </text:span><text:span text:style-name="T58">上來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40"><text:span text:style-name="T51"><text:s text:c="7"/>/ \ <text:s text:c="2"/>/ \</text:span><text:span text:style-name="T40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40"><text:span text:style-name="T51"><text:s text:c="5"/>10 <text:s/>20 70 <text:s/>50 <text:s text:c="3"/>← 50 </text:span><text:span text:style-name="T58">落到葉節點</text:span></text:p>
          </table:table-cell>
        </table:table-row>
        <table:table-row table:style-name="表格16.1">
          <table:table-cell table:style-name="表格16.A1" office:value-type="string">
            <text:p text:style-name="P2"/>
          </table:table-cell>
        </table:table-row>
        <table:table-row table:style-name="表格16.1">
          <table:table-cell table:style-name="表格16.A1" office:value-type="string">
            <text:p text:style-name="P2" loext:marker-style-name="T40"><text:span text:style-name="T51"><text:s text:c="2"/>50 </text:span><text:span text:style-name="T58">已是葉節點 → 停止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40"><text:span text:style-name="T51"><text:s text:c="2"/></text:span><text:span text:style-name="T58">陣列：</text:span><text:span text:style-name="T51">[90, 30, 80, 10, 20, 70, 50]</text:span></text:p>
          </table:table-cell>
        </table:table-row>
      </table:table>
      <text:p text:style-name="P1"/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2" loext:marker-style-name="T40"><text:span text:style-name="T58">最終結果：</text:span><text:span text:style-name="T51">Max Heap ✓</text:span>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" loext:marker-style-name="T40"><text:span text:style-name="T51"><text:s text:c="11"/>90</text:span><text:span text:style-name="T40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0"><text:span text:style-name="T51"><text:s text:c="10"/>/ <text:s/>\</text:span><text:span text:style-name="T40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0"><text:span text:style-name="T51"><text:s text:c="8"/>30 <text:s text:c="3"/>80</text:span><text:span text:style-name="T40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0"><text:span text:style-name="T51"><text:s text:c="7"/>/ \ <text:s text:c="2"/>/ \</text:span><text:span text:style-name="T40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0"><text:span text:style-name="T51"><text:s text:c="5"/>10 <text:s/>20 70 <text:s/>50</text:span><text:span text:style-name="T40"/>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" loext:marker-style-name="T40"><text:span text:style-name="T58">陣列：</text:span><text:span text:style-name="T51">[90, 30, 80, 10, 20, 70, 50]</text:span></text:p>
          </table:table-cell>
        </table:table-row>
      </table:table>
      <text:p text:style-name="P1"/>
      <text:h text:style-name="P16" text:outline-level="2" loext:marker-style-name="T17"><text:span text:style-name="T26">★ </text:span><text:span text:style-name="T87">為何 </text:span><text:span text:style-name="T99">Bottom-Up Build Heap</text:span><text:span text:style-name="T100"> =</text:span><text:span text:style-name="T26"> </text:span><text:span text:style-name="T172">O(n)</text:span><text:span text:style-name="T18">？</text:span></text:h>
      <text:p text:style-name="P32" loext:marker-style-name="T29"><text:span text:style-name="T30">關鍵直覺：</text:span><text:span text:style-name="T145">每個節點 </text:span><text:span text:style-name="T148">Heapify </text:span><text:span text:style-name="T145">的代價 </text:span><text:span text:style-name="T148">= </text:span><text:span text:style-name="T145">它在樹中的「高度」</text:span><text:span text:style-name="T30">（</text:span><text:span text:style-name="T121">往下最多能走幾層</text:span><text:span text:style-name="T30">）。</text:span></text:p>
      <text:p text:style-name="P32" loext:marker-style-name="T29"><text:span text:style-name="T30">高度愈低的節點數量愈多，代價愈小；高度愈高的節點數量愈少，代價愈大。兩者相乘加總後收斂至 </text:span><text:span text:style-name="T50">O(n)</text:span><text:span text:style-name="T30">。</text:span></text:p>
      <text:p text:style-name="P1"/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2" loext:marker-style-name="T40"><text:span text:style-name="T58">數學推導（高度加總法）：</text:span><text:span text:style-name="T78">(</text:span><text:span text:style-name="T70">後補</text:span><text:span text:style-name="T78">)</text:span></text:p>
          </table:table-cell>
        </table:table-row>
        <text:soft-page-break/>
        <table:table-row table:style-name="表格18.1">
          <table:table-cell table:style-name="表格18.A1" office:value-type="string">
            <text:p text:style-name="P2"/>
          </table:table-cell>
        </table:table-row>
        <table:table-row table:style-name="表格18.1">
          <table:table-cell table:style-name="表格18.A1" office:value-type="string">
            <text:p text:style-name="P2" loext:marker-style-name="T40"><text:span text:style-name="T51"><text:s text:c="2"/></text:span><text:span text:style-name="T58">高度為 </text:span><text:span text:style-name="T51">h </text:span><text:span text:style-name="T58">的節點數量 ≤ ⌈</text:span><text:span text:style-name="T51">n / 2^(h+1)⌉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0"><text:span text:style-name="T51"><text:s text:c="2"/></text:span><text:span text:style-name="T58">每個高度 </text:span><text:span text:style-name="T51">h </text:span><text:span text:style-name="T58">的節點，</text:span><text:span text:style-name="T51">Heapify </text:span><text:span text:style-name="T58">最多走 </text:span><text:span text:style-name="T51">h </text:span><text:span text:style-name="T58">步</text:span></text:p>
          </table:table-cell>
        </table:table-row>
        <table:table-row table:style-name="表格18.1">
          <table:table-cell table:style-name="表格18.A1" office:value-type="string">
            <text:p text:style-name="P2"/>
          </table:table-cell>
        </table:table-row>
        <table:table-row table:style-name="表格18.1">
          <table:table-cell table:style-name="表格18.A1" office:value-type="string">
            <text:p text:style-name="P2" loext:marker-style-name="T40"><text:span text:style-name="T51"><text:s text:c="2"/>T(n) = Σ(h=0 </text:span><text:span text:style-name="T58">到 ⌊</text:span><text:span text:style-name="T51">log n⌋) <text:s/>⌈n/2^(h+1)⌉ × h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0"><text:span text:style-name="T51"><text:s text:c="7"/>≤ n × Σ(h=0 </text:span><text:span text:style-name="T58">到 ∞</text:span><text:span text:style-name="T51">) <text:s/>h / 2^h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0"><text:span text:style-name="T51"><text:s text:c="7"/>= n × 2 <text:s/>= <text:s/>O(n)</text:span><text:span text:style-name="T40"/></text:p>
          </table:table-cell>
        </table:table-row>
        <table:table-row table:style-name="表格18.1">
          <table:table-cell table:style-name="表格18.A1" office:value-type="string">
            <text:p text:style-name="P2"/>
          </table:table-cell>
        </table:table-row>
        <table:table-row table:style-name="表格18.1">
          <table:table-cell table:style-name="表格18.A1" office:value-type="string">
            <text:p text:style-name="P2" loext:marker-style-name="T40"><text:span text:style-name="T51"><text:s text:c="2"/></text:span><text:span text:style-name="T58">（∑ </text:span><text:span text:style-name="T51">h/2^h </text:span><text:span text:style-name="T58">是收斂等比級數，值為 </text:span><text:span text:style-name="T51">2</text:span><text:span text:style-name="T58">）</text:span></text:p>
          </table:table-cell>
        </table:table-row>
        <table:table-row table:style-name="表格18.1">
          <table:table-cell table:style-name="表格18.A1" office:value-type="string">
            <text:p text:style-name="P2"/>
          </table:table-cell>
        </table:table-row>
        <table:table-row table:style-name="表格18.1">
          <table:table-cell table:style-name="表格18.A1" office:value-type="string">
            <text:p text:style-name="P2" loext:marker-style-name="T40"><text:span text:style-name="T58">白話理解：葉節點約佔一半，</text:span><text:span text:style-name="T51">Heapify </text:span><text:span text:style-name="T58">代價為 </text:span><text:span text:style-name="T51">0</text:span><text:span text:style-name="T58">；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129"><text:span text:style-name="T130">往上每層節點數減半，代價只加 </text:span><text:span text:style-name="T129">1</text:span><text:span text:style-name="T130">。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0"><text:span text:style-name="T170">整體工作量被大量葉節點的「零代價」攤平</text:span><text:span text:style-name="T58">，總代價 ∝ </text:span><text:span text:style-name="T51">n</text:span><text:span text:style-name="T58">。</text:span></text:p>
          </table:table-cell>
        </table:table-row>
      </table:table>
      <text:p text:style-name="P1"/>
      <table:table table:name="表格19" table:style-name="表格19">
        <table:table-column table:style-name="表格19.A" table:number-columns-repeated="3"/>
        <table:table-header-rows>
          <table:table-row table:style-name="表格19.1">
            <table:table-cell table:style-name="表格19.A1" office:value-type="string">
              <text:p text:style-name="P31" loext:marker-style-name="T5"><text:span text:style-name="T6">方法</text:span><text:span text:style-name="T5"/></text:p>
            </table:table-cell>
            <table:table-cell table:style-name="表格19.A1" office:value-type="string">
              <text:p text:style-name="P31" loext:marker-style-name="T5"><text:span text:style-name="T6">時間複雜度</text:span><text:span text:style-name="T5"/></text:p>
            </table:table-cell>
            <table:table-cell table:style-name="表格19.A1" office:value-type="string">
              <text:p text:style-name="P31" loext:marker-style-name="T5"><text:span text:style-name="T6">適用情境</text:span><text:span text:style-name="T5"/>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31" loext:marker-style-name="T131"><text:span text:style-name="T132">逐個 </text:span><text:span text:style-name="T131">Insert</text:span></text:p>
          </table:table-cell>
          <table:table-cell table:style-name="表格19.A2" office:value-type="string">
            <text:p text:style-name="P31" loext:marker-style-name="T40"><text:span text:style-name="T51">O(</text:span><text:span text:style-name="T52">n log n</text:span><text:span text:style-name="T51">)</text:span></text:p>
          </table:table-cell>
          <table:table-cell table:style-name="表格19.A2" office:value-type="string">
            <text:p text:style-name="P31" loext:marker-style-name="T40"><text:span text:style-name="T58">動態逐一加入</text:span><text:span text:style-name="T40"/></text:p>
          </table:table-cell>
        </table:table-row>
        <table:table-row table:style-name="表格19.1">
          <table:table-cell table:style-name="表格19.A3" office:value-type="string">
            <text:p text:style-name="P31" loext:marker-style-name="T131"><text:span text:style-name="T131">Bottom-Up Build Heap</text:span><text:span text:style-name="T131"/></text:p>
          </table:table-cell>
          <table:table-cell table:style-name="表格19.A3" office:value-type="string">
            <text:p text:style-name="P31" loext:marker-style-name="T40"><text:span text:style-name="T51">O(</text:span><text:span text:style-name="T52">n</text:span><text:span text:style-name="T51">) ★</text:span></text:p>
          </table:table-cell>
          <table:table-cell table:style-name="表格19.A3" office:value-type="string">
            <text:p text:style-name="P31" loext:marker-style-name="T40"><text:span text:style-name="T58">一次性建立</text:span><text:span text:style-name="T40"/></text:p>
          </table:table-cell>
        </table:table-row>
      </table:table>
      <text:p text:style-name="P1"/>
      <text:p text:style-name="P1"/>
      <text:h text:style-name="P13" text:outline-level="1" loext:marker-style-name="T3"><text:span text:style-name="T4">五、</text:span><text:span text:style-name="T10">Heap Sort</text:span><text:span text:style-name="T4">（堆積排序）</text:span></text:h>
      <text:p text:style-name="P32" loext:marker-style-name="T29"><text:span text:style-name="T50">Heap Sort </text:span><text:span text:style-name="T30">利用 </text:span><text:span text:style-name="T50">Heap </text:span><text:span text:style-name="T30">結構進行排序，分為兩個階段：</text:span></text:p>
      <text:p text:style-name="P1"/>
      <text:list xml:id="list1695230943" text:style-name="WWNum2">
        <text:list-item>
          <text:p text:style-name="P35" loext:marker-style-name="T29"><text:span text:style-name="T50">Phase 1</text:span><text:span text:style-name="T30">：</text:span><text:span text:style-name="T119">Build Heap</text:span><text:span text:style-name="T50"> — </text:span><text:span text:style-name="T174">將原始陣列建成 </text:span><text:span text:style-name="T175">Max Heap</text:span><text:span text:style-name="T30">，時間 </text:span><text:span text:style-name="T50">O(n)</text:span><text:span text:style-name="T30">。</text:span></text:p>
        </text:list-item>
        <text:list-item>
          <text:p text:style-name="P35" loext:marker-style-name="T29"><text:span text:style-name="T50">Phase 2</text:span><text:span text:style-name="T30">：</text:span><text:span text:style-name="T88">反覆 </text:span><text:span text:style-name="T97">Extract-Max</text:span><text:span text:style-name="T50"> — </text:span><text:span text:style-name="T71">取出 </text:span><text:span text:style-name="T79">Root</text:span><text:span text:style-name="T71">（最大值），放到陣列末端</text:span><text:span text:style-name="T30">，</text:span><text:span text:style-name="T32">再 </text:span><text:span text:style-name="T47">Heapify</text:span><text:span text:style-name="T30">，重複 </text:span><text:span text:style-name="T49">n-1</text:span><text:span text:style-name="T50"> </text:span><text:span text:style-name="T30">次，每次 </text:span><text:span text:style-name="T50">O(</text:span><text:span text:style-name="T148">log n</text:span><text:span text:style-name="T50">)</text:span><text:span text:style-name="T30">。</text:span></text:p>
        </text:list-item>
      </text:list>
      <text:p text:style-name="P1"/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2" loext:marker-style-name="T40"><text:span text:style-name="T51">Heap Sort </text:span><text:span text:style-name="T58">總時間 </text:span><text:span text:style-name="T51">= O(</text:span><text:span text:style-name="T52">n</text:span><text:span text:style-name="T51">) + O(</text:span><text:span text:style-name="T52">n log n</text:span><text:span text:style-name="T51">) = O(</text:span><text:span text:style-name="T142">n log n</text:span><text:span text:style-name="T51">)</text:span></text:p>
          </table:table-cell>
        </table:table-row>
        <table:table-row table:style-name="表格20.1">
          <table:table-cell table:style-name="表格20.A1" office:value-type="string">
            <text:p text:style-name="P2" loext:marker-style-name="T40"><text:span text:style-name="T58">空間複雜度 </text:span><text:span text:style-name="T51">= O(1)</text:span><text:span text:style-name="T58">（</text:span><text:span text:style-name="T51">In-place</text:span><text:span text:style-name="T58">，不需額外陣列）</text:span></text:p>
          </table:table-cell>
        </table:table-row>
        <table:table-row table:style-name="表格20.1">
          <table:table-cell table:style-name="表格20.A1" office:value-type="string">
            <text:p text:style-name="P2" loext:marker-style-name="T40"><text:span text:style-name="T58">穩定性 </text:span><text:span text:style-name="T51">= </text:span><text:span text:style-name="T58">不穩定（</text:span><text:span text:style-name="T51">Unstable</text:span><text:span text:style-name="T58">）</text:span></text:p>
          </table:table-cell>
        </table:table-row>
      </table:table>
      <text:p text:style-name="P1"/>
      <text:p text:style-name="P32" loext:marker-style-name="T29"><text:span text:style-name="T31">範例：對 </text:span><text:span text:style-name="T48">[4, 2, 7, 1, 5] </text:span><text:span text:style-name="T31">排序</text:span></text:p>
      <text:p text:style-name="P1"/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2" loext:marker-style-name="T40"><text:span text:style-name="T51">Phase 1 — </text:span><text:span text:style-name="T131">Build Max Heap</text:span><text:span text:style-name="T58">：</text:span></text:p>
          </table:table-cell>
        </table:table-row>
        <text:soft-page-break/>
        <table:table-row table:style-name="表格21.1">
          <table:table-cell table:style-name="表格21.A1" office:value-type="string">
            <text:p text:style-name="P2"/>
          </table:table-cell>
        </table:table-row>
        <table:table-row table:style-name="表格21.1">
          <table:table-cell table:style-name="表格21.A1" office:value-type="string">
            <text:p text:style-name="P2" loext:marker-style-name="T40"><text:span text:style-name="T58">原始：</text:span><text:span text:style-name="T51">[4, 2, 7, 1, 5]</text:span></text:p>
          </table:table-cell>
        </table:table-row>
        <table:table-row table:style-name="表格21.1">
          <table:table-cell table:style-name="表格21.A1" office:value-type="string">
            <text:p text:style-name="P2"/>
          </table:table-cell>
        </table:table-row>
        <table:table-row table:style-name="表格21.1">
          <table:table-cell table:style-name="表格21.A1" office:value-type="string">
            <text:p text:style-name="P2" loext:marker-style-name="T40"><text:span text:style-name="T52">n=5</text:span><text:span text:style-name="T58">，</text:span><text:span text:style-name="T103">最後非葉節點 </text:span><text:span text:style-name="T102">= </text:span><text:span text:style-name="T91">⌊5/2⌋ = 2</text:span></text:p>
          </table:table-cell>
        </table:table-row>
        <table:table-row table:style-name="表格21.1">
          <table:table-cell table:style-name="表格21.A1" office:value-type="string">
            <text:p text:style-name="P2"/>
          </table:table-cell>
        </table:table-row>
        <table:table-row table:style-name="表格21.1">
          <table:table-cell table:style-name="表格21.A1" office:value-type="string">
            <text:p text:style-name="P2" loext:marker-style-name="T40"><text:span text:style-name="T58">初始樹狀：</text:span><text:span text:style-name="T40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40"><text:span text:style-name="T51"><text:s text:c="8"/>4</text:span><text:span text:style-name="T40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40"><text:span text:style-name="T51"><text:s text:c="7"/>/ \</text:span><text:span text:style-name="T40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40"><text:span text:style-name="T51"><text:s text:c="5"/></text:span><text:span text:style-name="T91"><text:s/>2</text:span><text:span text:style-name="T51"> <text:s text:c="2"/>7</text:span></text:p>
          </table:table-cell>
        </table:table-row>
        <table:table-row table:style-name="表格21.1">
          <table:table-cell table:style-name="表格21.A1" office:value-type="string">
            <text:p text:style-name="P2" loext:marker-style-name="T40"><text:span text:style-name="T51"><text:s text:c="5"/>/ \</text:span><text:span text:style-name="T40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40"><text:span text:style-name="T51"><text:s text:c="4"/>1 <text:s text:c="2"/>5</text:span><text:span text:style-name="T40"/></text:p>
          </table:table-cell>
        </table:table-row>
        <table:table-row table:style-name="表格21.1">
          <table:table-cell table:style-name="表格21.A1" office:value-type="string">
            <text:p text:style-name="P2"/>
          </table:table-cell>
        </table:table-row>
        <table:table-row table:style-name="表格21.1">
          <table:table-cell table:style-name="表格21.A1" office:value-type="string">
            <text:p text:style-name="P2" loext:marker-style-name="T40"><text:span text:style-name="T127">Heapify(2)</text:span><text:span text:style-name="T58">：</text:span><text:span text:style-name="T52">2 </text:span><text:span text:style-name="T53">的子節點 </text:span><text:span text:style-name="T52">1, 5</text:span><text:span text:style-name="T58">；</text:span><text:span text:style-name="T142">5 &gt; 2 → </text:span><text:span text:style-name="T143">交換</text:span></text:p>
          </table:table-cell>
        </table:table-row>
        <table:table-row table:style-name="表格21.1">
          <table:table-cell table:style-name="表格21.A1" office:value-type="string">
            <text:p text:style-name="P2" loext:marker-style-name="T40"><text:span text:style-name="T51"><text:s text:c="8"/>4</text:span><text:span text:style-name="T40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40"><text:span text:style-name="T51"><text:s text:c="7"/>/ \</text:span><text:span text:style-name="T40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40"><text:span text:style-name="T51"><text:s text:c="6"/>5 <text:s text:c="2"/>7</text:span><text:span text:style-name="T40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40"><text:span text:style-name="T51"><text:s text:c="5"/>/ \</text:span><text:span text:style-name="T40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40"><text:span text:style-name="T51"><text:s text:c="4"/>1 <text:s text:c="2"/>2</text:span><text:span text:style-name="T40"/></text:p>
          </table:table-cell>
        </table:table-row>
        <table:table-row table:style-name="表格21.1">
          <table:table-cell table:style-name="表格21.A1" office:value-type="string">
            <text:p text:style-name="P2"/>
          </table:table-cell>
        </table:table-row>
        <table:table-row table:style-name="表格21.1">
          <table:table-cell table:style-name="表格21.A1" office:value-type="string">
            <text:p text:style-name="P2" loext:marker-style-name="T40"><text:span text:style-name="T127">Heapify(1)</text:span><text:span text:style-name="T58">：</text:span><text:span text:style-name="T52">4 </text:span><text:span text:style-name="T53">的子節點 </text:span><text:span text:style-name="T52">5, 7</text:span><text:span text:style-name="T58">；</text:span><text:span text:style-name="T142">7 &gt; 4 → </text:span><text:span text:style-name="T143">交換</text:span></text:p>
          </table:table-cell>
        </table:table-row>
        <table:table-row table:style-name="表格21.1">
          <table:table-cell table:style-name="表格21.A1" office:value-type="string">
            <text:p text:style-name="P2" loext:marker-style-name="T40"><text:span text:style-name="T51"><text:s text:c="8"/>7</text:span><text:span text:style-name="T40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40"><text:span text:style-name="T51"><text:s text:c="7"/>/ \</text:span><text:span text:style-name="T40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40"><text:span text:style-name="T51"><text:s text:c="6"/>5 <text:s text:c="2"/>4</text:span><text:span text:style-name="T40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40"><text:span text:style-name="T51"><text:s text:c="5"/>/ \</text:span><text:span text:style-name="T40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40"><text:span text:style-name="T51"><text:s text:c="4"/>1 <text:s text:c="2"/>2</text:span><text:span text:style-name="T40"/></text:p>
          </table:table-cell>
        </table:table-row>
        <table:table-row table:style-name="表格21.1">
          <table:table-cell table:style-name="表格21.A1" office:value-type="string">
            <text:p text:style-name="P2"/>
          </table:table-cell>
        </table:table-row>
        <table:table-row table:style-name="表格21.1">
          <table:table-cell table:style-name="表格21.A1" office:value-type="string">
            <text:p text:style-name="P2" loext:marker-style-name="T40"><text:span text:style-name="T51">Max Heap </text:span><text:span text:style-name="T58">完成：</text:span><text:span text:style-name="T51">[7, 5, 4, 1, 2]</text:span></text:p>
          </table:table-cell>
        </table:table-row>
      </table:table>
      <text:p text:style-name="P1"/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2" loext:marker-style-name="T40"><text:span text:style-name="T51">Phase 2 — </text:span><text:span text:style-name="T158">反覆</text:span><text:span text:style-name="T58"> </text:span><text:span text:style-name="T91">Extract-Max</text:span><text:span text:style-name="T58">：</text:span>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ext:soft-page-break/>
        <table:table-row table:style-name="表格22.1">
          <table:table-cell table:style-name="表格22.A1" office:value-type="string">
            <text:p text:style-name="P2" loext:marker-style-name="T40"><text:span text:style-name="T51">Step 1</text:span><text:span text:style-name="T58">：取出 </text:span><text:span text:style-name="T51">Root=7</text:span><text:span text:style-name="T58">，末端 </text:span><text:span text:style-name="T51">2 </text:span><text:span text:style-name="T58">移到 </text:span><text:span text:style-name="T51">Root</text:span><text:span text:style-name="T58">，</text:span><text:span text:style-name="T51">Heapify</text:span></text:p>
          </table:table-cell>
        </table:table-row>
        <table:table-row table:style-name="表格22.1">
          <table:table-cell table:style-name="表格22.A1" office:value-type="string">
            <text:p text:style-name="P2" loext:marker-style-name="T40"><text:span text:style-name="T51"><text:s text:c="2"/>→ [5, 2, 4, 1 | 7]</text:span><text:span text:style-name="T40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0"><text:span text:style-name="T51"><text:s text:c="8"/>5</text:span><text:span text:style-name="T40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0"><text:span text:style-name="T51"><text:s text:c="7"/>/ \</text:span><text:span text:style-name="T40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0"><text:span text:style-name="T51"><text:s text:c="6"/>2 <text:s text:c="2"/>4</text:span><text:span text:style-name="T40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0"><text:span text:style-name="T51"><text:s text:c="5"/>/</text:span><text:span text:style-name="T40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0"><text:span text:style-name="T51"><text:s text:c="4"/>1</text:span><text:span text:style-name="T40"/>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able:table-row table:style-name="表格22.1">
          <table:table-cell table:style-name="表格22.A1" office:value-type="string">
            <text:p text:style-name="P2" loext:marker-style-name="T40"><text:span text:style-name="T51">Step 2</text:span><text:span text:style-name="T58">：取出 </text:span><text:span text:style-name="T51">Root=5</text:span><text:span text:style-name="T58">，末端 </text:span><text:span text:style-name="T51">1 </text:span><text:span text:style-name="T58">移到 </text:span><text:span text:style-name="T51">Root</text:span><text:span text:style-name="T58">，</text:span><text:span text:style-name="T51">Heapify</text:span></text:p>
          </table:table-cell>
        </table:table-row>
        <table:table-row table:style-name="表格22.1">
          <table:table-cell table:style-name="表格22.A1" office:value-type="string">
            <text:p text:style-name="P2" loext:marker-style-name="T40"><text:span text:style-name="T51"><text:s text:c="2"/>→ [4, 2, 1 | 5, 7]</text:span><text:span text:style-name="T40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0"><text:span text:style-name="T51"><text:s text:c="8"/>4</text:span><text:span text:style-name="T40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0"><text:span text:style-name="T51"><text:s text:c="7"/>/ \</text:span><text:span text:style-name="T40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0"><text:span text:style-name="T51"><text:s text:c="6"/>2 <text:s text:c="2"/>1</text:span><text:span text:style-name="T40"/>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able:table-row table:style-name="表格22.1">
          <table:table-cell table:style-name="表格22.A1" office:value-type="string">
            <text:p text:style-name="P2" loext:marker-style-name="T40"><text:span text:style-name="T51">Step 3</text:span><text:span text:style-name="T58">：取出 </text:span><text:span text:style-name="T51">Root=4</text:span><text:span text:style-name="T58">，末端 </text:span><text:span text:style-name="T51">1 </text:span><text:span text:style-name="T58">移到 </text:span><text:span text:style-name="T51">Root</text:span><text:span text:style-name="T58">，</text:span><text:span text:style-name="T51">Heapify</text:span></text:p>
          </table:table-cell>
        </table:table-row>
        <table:table-row table:style-name="表格22.1">
          <table:table-cell table:style-name="表格22.A1" office:value-type="string">
            <text:p text:style-name="P2" loext:marker-style-name="T40"><text:span text:style-name="T51"><text:s text:c="2"/>→ [2, 1 | 4, 5, 7]</text:span><text:span text:style-name="T40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0"><text:span text:style-name="T51"><text:s text:c="8"/>2</text:span><text:span text:style-name="T40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0"><text:span text:style-name="T51"><text:s text:c="7"/>/</text:span><text:span text:style-name="T40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0"><text:span text:style-name="T51"><text:s text:c="6"/>1</text:span><text:span text:style-name="T40"/>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able:table-row table:style-name="表格22.1">
          <table:table-cell table:style-name="表格22.A1" office:value-type="string">
            <text:p text:style-name="P2" loext:marker-style-name="T40"><text:span text:style-name="T51">Step 4</text:span><text:span text:style-name="T58">：取出 </text:span><text:span text:style-name="T51">Root=2</text:span><text:span text:style-name="T58">，末端 </text:span><text:span text:style-name="T51">1 </text:span><text:span text:style-name="T58">移到 </text:span><text:span text:style-name="T51">Root</text:span></text:p>
          </table:table-cell>
        </table:table-row>
        <table:table-row table:style-name="表格22.1">
          <table:table-cell table:style-name="表格22.A1" office:value-type="string">
            <text:p text:style-name="P2" loext:marker-style-name="T40"><text:span text:style-name="T51"><text:s text:c="2"/>→ [1 | 2, 4, 5, 7]</text:span><text:span text:style-name="T40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0"><text:span text:style-name="T51"><text:s text:c="8"/>1</text:span><text:span text:style-name="T40"/>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able:table-row table:style-name="表格22.1">
          <table:table-cell table:style-name="表格22.A1" office:value-type="string">
            <text:p text:style-name="P2" loext:marker-style-name="T156"><text:span text:style-name="T157">最終排序（升冪）：</text:span><text:span text:style-name="T156">[1, 2, 4, 5, 7] ✓</text:span></text:p>
          </table:table-cell>
        </table:table-row>
      </table:table>
      <text:p text:style-name="P1"/>
      <text:p text:style-name="P1"/>
      <text:h text:style-name="P13" text:outline-level="1" loext:marker-style-name="T3"><text:span text:style-name="T4">六、優先佇列（</text:span><text:span text:style-name="T10">Priority Queue</text:span><text:span text:style-name="T4">）實作方式比較</text:span></text:h>
      <text:p text:style-name="P32" loext:marker-style-name="T29"><text:span text:style-name="T79">Priority Queue</text:span><text:span text:style-name="T71">（優先佇列）</text:span><text:span text:style-name="T30">是</text:span><text:span text:style-name="T121">每次取出「優先值最高」元素的資料結構</text:span><text:span text:style-name="T30">。三種常見實作比較：</text:span></text:p>
      <text:p text:style-name="P1"/>
      <table:table table:name="表格23" table:style-name="表格23">
        <table:table-column table:style-name="表格23.A" table:number-columns-repeated="3"/>
        <table:table-header-rows>
          <text:soft-page-break/>
          <table:table-row table:style-name="表格23.1">
            <table:table-cell table:style-name="表格23.A1" office:value-type="string">
              <text:p text:style-name="P31" loext:marker-style-name="T5"><text:span text:style-name="T6">實作方式</text:span><text:span text:style-name="T5"/></text:p>
            </table:table-cell>
            <table:table-cell table:style-name="表格23.A1" office:value-type="string">
              <text:p text:style-name="P31" loext:marker-style-name="T5"><text:span text:style-name="T13">Insert</text:span><text:span text:style-name="T5"/></text:p>
            </table:table-cell>
            <table:table-cell table:style-name="表格23.A1" office:value-type="string">
              <text:p text:style-name="P31" loext:marker-style-name="T5"><text:span text:style-name="T13">Extract-Max</text:span><text:span text:style-name="T6">（取最大）</text:span>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31" loext:marker-style-name="T40"><text:span text:style-name="T132">排序好的</text:span><text:span text:style-name="T58">陣列</text:span></text:p>
          </table:table-cell>
          <table:table-cell table:style-name="表格23.A2" office:value-type="string">
            <text:p text:style-name="P31" loext:marker-style-name="T40"><text:span text:style-name="T51">O(n)</text:span><text:span text:style-name="T40"/></text:p>
          </table:table-cell>
          <table:table-cell table:style-name="表格23.A2" office:value-type="string">
            <text:p text:style-name="P31" loext:marker-style-name="T40"><text:span text:style-name="T51">O(1) <text:s/></text:span><text:span text:style-name="T58">取快插慢</text:span></text:p>
          </table:table-cell>
        </table:table-row>
        <table:table-row table:style-name="表格23.1">
          <table:table-cell table:style-name="表格23.A2" office:value-type="string">
            <text:p text:style-name="P31" loext:marker-style-name="T40"><text:span text:style-name="T132">未排序的</text:span><text:span text:style-name="T58">陣列</text:span></text:p>
          </table:table-cell>
          <table:table-cell table:style-name="表格23.A2" office:value-type="string">
            <text:p text:style-name="P31" loext:marker-style-name="T40"><text:span text:style-name="T51">O(1)</text:span><text:span text:style-name="T40"/></text:p>
          </table:table-cell>
          <table:table-cell table:style-name="表格23.A2" office:value-type="string">
            <text:p text:style-name="P31" loext:marker-style-name="T40"><text:span text:style-name="T51">O(n) <text:s/></text:span><text:span text:style-name="T58">插快取慢</text:span></text:p>
          </table:table-cell>
        </table:table-row>
        <table:table-row table:style-name="表格23.1">
          <table:table-cell table:style-name="表格23.A4" office:value-type="string">
            <text:p text:style-name="P31" loext:marker-style-name="T40"><text:span text:style-name="T51">Max Heap ★</text:span><text:span text:style-name="T40"/></text:p>
          </table:table-cell>
          <table:table-cell table:style-name="表格23.A4" office:value-type="string">
            <text:p text:style-name="P31" loext:marker-style-name="T142"><text:span text:style-name="T142">O(log n)</text:span><text:span text:style-name="T142"/></text:p>
          </table:table-cell>
          <table:table-cell table:style-name="表格23.A4" office:value-type="string">
            <text:p text:style-name="P31" loext:marker-style-name="T40"><text:span text:style-name="T127">O(log n)</text:span><text:span text:style-name="T51"> <text:s/></text:span><text:span text:style-name="T58">兩者均衡</text:span></text:p>
          </table:table-cell>
        </table:table-row>
      </table:table>
      <text:p text:style-name="P1"/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2" loext:marker-style-name="T40"><text:span text:style-name="T51">💡 </text:span><text:span text:style-name="T58">考試重點：</text:span></text:p>
          </table:table-cell>
        </table:table-row>
        <table:table-row table:style-name="表格24.1">
          <table:table-cell table:style-name="表格24.A1" office:value-type="string">
            <text:p text:style-name="P2" loext:marker-style-name="T40"><text:span text:style-name="T91">Heap </text:span><text:span text:style-name="T92">是 </text:span><text:span text:style-name="T91">Priority Queue </text:span><text:span text:style-name="T92">最常見的實作</text:span><text:span text:style-name="T58">，</text:span></text:p>
          </table:table-cell>
        </table:table-row>
        <table:table-row table:style-name="表格24.1">
          <table:table-cell table:style-name="表格24.A1" office:value-type="string">
            <text:p text:style-name="P2" loext:marker-style-name="T40"><text:span text:style-name="T58">原因是 </text:span><text:span text:style-name="T142">Insert </text:span><text:span text:style-name="T143">和 </text:span><text:span text:style-name="T142">Extract </text:span><text:span text:style-name="T143">都是 </text:span><text:span text:style-name="T142">O(log n)</text:span><text:span text:style-name="T58">，</text:span></text:p>
          </table:table-cell>
        </table:table-row>
        <table:table-row table:style-name="表格24.1">
          <table:table-cell table:style-name="表格24.A1" office:value-type="string">
            <text:p text:style-name="P2" loext:marker-style-name="T40"><text:span text:style-name="T58">是</text:span><text:span text:style-name="T157">三種方案中最均衡的折衷解</text:span><text:span text:style-name="T58">。</text:span></text:p>
          </table:table-cell>
        </table:table-row>
        <table:table-row table:style-name="表格24.1">
          <table:table-cell table:style-name="表格24.A1" office:value-type="string">
            <text:p text:style-name="P2"/>
          </table:table-cell>
        </table:table-row>
        <table:table-row table:style-name="表格24.1">
          <table:table-cell table:style-name="表格24.A1" office:value-type="string">
            <text:p text:style-name="P2" loext:marker-style-name="T40"><text:span text:style-name="T58">應用場景：印表機緩衝（高優先文件先印）、作業系統 </text:span><text:span text:style-name="T51">CPU </text:span><text:span text:style-name="T58">排程。</text:span></text:p>
          </table:table-cell>
        </table:table-row>
      </table:table>
      <text:p text:style-name="P1"/>
      <text:p text:style-name="P1"/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2" loext:marker-style-name="T40"><text:span text:style-name="T51">① </text:span><text:span text:style-name="T132">排序好的</text:span><text:span text:style-name="T58">陣列（維持升冪）</text:span></text:p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" loext:marker-style-name="T40"><text:span text:style-name="T51">Insert 50</text:span><text:span text:style-name="T58">：需找到正確位置並挪動元素</text:span></text:p>
          </table:table-cell>
        </table:table-row>
        <table:table-row table:style-name="表格25.1">
          <table:table-cell table:style-name="表格25.A1" office:value-type="string">
            <text:p text:style-name="P2" loext:marker-style-name="T40"><text:span text:style-name="T51"><text:s text:c="2"/>Before: <text:s/>[10, 30, 70, 80]</text:span><text:span text:style-name="T40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0"><text:span text:style-name="T51"><text:s text:c="2"/></text:span><text:span text:style-name="T58">挪動 </text:span><text:span text:style-name="T51">70, 80 </text:span><text:span text:style-name="T58">後</text:span><text:span text:style-name="T51">:</text:span></text:p>
          </table:table-cell>
        </table:table-row>
        <table:table-row table:style-name="表格25.1">
          <table:table-cell table:style-name="表格25.A1" office:value-type="string">
            <text:p text:style-name="P2" loext:marker-style-name="T40"><text:span text:style-name="T51"><text:s text:c="2"/>After: <text:s text:c="2"/>[10, 30, </text:span><text:span text:style-name="T55">50</text:span><text:span text:style-name="T51">, 70, 80] <text:s text:c="2"/>← </text:span><text:span text:style-name="T52">O(n)</text:span></text:p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" loext:marker-style-name="T40"><text:span text:style-name="T51">Extract-Max</text:span><text:span text:style-name="T58">：直接取末端</text:span></text:p>
          </table:table-cell>
        </table:table-row>
        <table:table-row table:style-name="表格25.1">
          <table:table-cell table:style-name="表格25.A1" office:value-type="string">
            <text:p text:style-name="P2" loext:marker-style-name="T40"><text:span text:style-name="T51"><text:s text:c="2"/>Before: <text:s/>[10, 30, 50, 70, 80]</text:span><text:span text:style-name="T40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0"><text:span text:style-name="T51"><text:s text:c="2"/>After: <text:s text:c="2"/>[10, 30, 50, 70] <text:s text:c="2"/></text:span><text:span text:style-name="T58">取出 </text:span><text:span text:style-name="T51">80 <text:s text:c="2"/>←</text:span><text:span text:style-name="T52"> O(1)</text:span></text:p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" loext:marker-style-name="T40"><text:span text:style-name="T51">② </text:span><text:span text:style-name="T132">未排序的</text:span><text:span text:style-name="T58">陣列</text:span></text:p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" loext:marker-style-name="T40"><text:span text:style-name="T51">Insert 50</text:span><text:span text:style-name="T58">：直接放末端，不管順序</text:span></text:p>
          </table:table-cell>
        </table:table-row>
        <table:table-row table:style-name="表格25.1">
          <table:table-cell table:style-name="表格25.A1" office:value-type="string">
            <text:p text:style-name="P2" loext:marker-style-name="T40"><text:span text:style-name="T51"><text:s text:c="2"/>Before: <text:s/>[80, 10, 30, 70]</text:span><text:span text:style-name="T40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0"><text:span text:style-name="T51"><text:s text:c="2"/>After: <text:s text:c="2"/>[80, 10, 30, 70, 50] <text:s text:c="2"/>← </text:span><text:span text:style-name="T52">O(1)</text:span></text:p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ext:soft-page-break/>
        <table:table-row table:style-name="表格25.1">
          <table:table-cell table:style-name="表格25.A1" office:value-type="string">
            <text:p text:style-name="P2" loext:marker-style-name="T40"><text:span text:style-name="T51">Extract-Max</text:span><text:span text:style-name="T58">：沒有順序，只能全部掃描</text:span></text:p>
          </table:table-cell>
        </table:table-row>
        <table:table-row table:style-name="表格25.1">
          <table:table-cell table:style-name="表格25.A1" office:value-type="string">
            <text:p text:style-name="P2" loext:marker-style-name="T40"><text:span text:style-name="T51"><text:s text:c="2"/>Before: <text:s/>[80, 10, 30, 70, 50]</text:span><text:span text:style-name="T40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0"><text:span text:style-name="T51"><text:s text:c="2"/></text:span><text:span text:style-name="T58">掃描</text:span><text:span text:style-name="T51">: 80? 10? 30? 70? 50? <text:s/>→ </text:span><text:span text:style-name="T58">找到 </text:span><text:span text:style-name="T51">80</text:span></text:p>
          </table:table-cell>
        </table:table-row>
        <table:table-row table:style-name="表格25.1">
          <table:table-cell table:style-name="表格25.A1" office:value-type="string">
            <text:p text:style-name="P2" loext:marker-style-name="T40"><text:span text:style-name="T51"><text:s text:c="2"/>After: <text:s text:c="2"/>[10, 30, 70, 50] <text:s text:c="2"/></text:span><text:span text:style-name="T58">取出 </text:span><text:span text:style-name="T51">80 <text:s text:c="2"/>← </text:span><text:span text:style-name="T52">O(n)</text:span></text:p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" loext:marker-style-name="T40"><text:span text:style-name="T51">③ Max Heap</text:span><text:span text:style-name="T40"/></text:p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" loext:marker-style-name="T40"><text:span text:style-name="T51">Insert 50</text:span><text:span text:style-name="T58">：放末端，</text:span><text:span text:style-name="T51">Bubble Up </text:span><text:span text:style-name="T58">往上比較交換</text:span></text:p>
          </table:table-cell>
        </table:table-row>
        <table:table-row table:style-name="表格25.1">
          <table:table-cell table:style-name="表格25.A1" office:value-type="string">
            <text:p text:style-name="P2" loext:marker-style-name="T40"><text:span text:style-name="T51"><text:s text:c="9"/>80 <text:s text:c="16"/>80</text:span><text:span text:style-name="T40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0"><text:span text:style-name="T51"><text:s text:c="9"/>/ <text:s/>\ <text:s text:c="15"/>/ <text:s text:c="2"/>\</text:span><text:span text:style-name="T40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0"><text:span text:style-name="T51"><text:s text:c="6"/>70 <text:s text:c="2"/>30 <text:s text:c="3"/>→ <text:s/>70 <text:s text:c="2"/>30</text:span><text:span text:style-name="T40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0"><text:span text:style-name="T51"><text:s text:c="6"/>/ <text:s text:c="18"/>/ <text:s text:c="2"/>\</text:span><text:span text:style-name="T40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0"><text:span text:style-name="T51"><text:s text:c="4"/>10 <text:s text:c="14"/>10 <text:s text:c="2"/>50 ← </text:span><text:span text:style-name="T156">50 </text:span><text:span text:style-name="T157">直接就合法，停</text:span></text:p>
          </table:table-cell>
        </table:table-row>
        <table:table-row table:style-name="表格25.1">
          <table:table-cell table:style-name="表格25.A1" office:value-type="string">
            <text:p text:style-name="P2" loext:marker-style-name="T40"><text:span text:style-name="T51"><text:s text:c="61"/></text:span><text:span text:style-name="T142">O(log n)</text:span></text:p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" loext:marker-style-name="T40"><text:span text:style-name="T51">Extract-Max</text:span><text:span text:style-name="T58">：</text:span><text:span text:style-name="T74">取出 </text:span><text:span text:style-name="T75">Root=80</text:span><text:span text:style-name="T58">，</text:span><text:span text:style-name="T169">末端</text:span><text:span text:style-name="T58"> </text:span><text:span text:style-name="T51">50 </text:span><text:span text:style-name="T169">補位</text:span><text:span text:style-name="T58">，</text:span><text:span text:style-name="T51">Heapify </text:span><text:span text:style-name="T58">往下交換</text:span></text:p>
          </table:table-cell>
        </table:table-row>
        <table:table-row table:style-name="表格25.1">
          <table:table-cell table:style-name="表格25.A1" office:value-type="string">
            <text:p text:style-name="P2" loext:marker-style-name="T40"><text:span text:style-name="T51"><text:s text:c="9"/>80 <text:s text:c="16"/>50 <text:s text:c="17"/>70</text:span><text:span text:style-name="T40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0"><text:span text:style-name="T51"><text:s text:c="8"/>/ <text:s text:c="2"/>\ <text:s text:c="15"/>/ <text:s text:c="2"/>\ <text:s text:c="16"/>/ <text:s text:c="2"/>\</text:span><text:span text:style-name="T40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0"><text:span text:style-name="T51"><text:s text:c="5"/>70 <text:s text:c="2"/>30 <text:s text:c="2"/>→ <text:s text:c="3"/>70 <text:s text:c="2"/>30 <text:s text:c="3"/>→ <text:s text:c="3"/>50 <text:s text:c="2"/>30</text:span><text:span text:style-name="T40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0"><text:span text:style-name="T51"><text:s text:c="5"/>/ <text:s text:c="2"/>\ <text:s text:c="15"/>/ <text:s text:c="20"/>/</text:span><text:span text:style-name="T40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0"><text:span text:style-name="T51"><text:s text:c="2"/>10 <text:s text:c="2"/>50 <text:s text:c="9"/>10 <text:s text:c="18"/>10</text:span><text:span text:style-name="T40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0"><text:span text:style-name="T51"><text:s text:c="3"/></text:span><text:span text:style-name="T58">取出 </text:span><text:span text:style-name="T51">80 <text:s text:c="5"/>50 </text:span><text:span text:style-name="T58">移到 </text:span><text:span text:style-name="T51">Root <text:s text:c="4"/>Heapify </text:span><text:span text:style-name="T58">完成</text:span></text:p>
          </table:table-cell>
        </table:table-row>
        <table:table-row table:style-name="表格25.1">
          <table:table-cell table:style-name="表格25.A1" office:value-type="string">
            <text:p text:style-name="P2" loext:marker-style-name="T40"><text:span text:style-name="T51"><text:s text:c="57"/></text:span><text:span text:style-name="T142">O(log n)</text:span></text:p>
          </table:table-cell>
        </table:table-row>
      </table:table>
      <text:p text:style-name="P1"/>
      <text:h text:style-name="P3" text:outline-level="1" loext:marker-style-name="T176"><text:span text:style-name="T177">七、</text:span><text:span text:style-name="T176">Interval Heap</text:span><text:span text:style-name="T177">（區間堆積）【</text:span><text:span text:style-name="T176">110</text:span><text:span text:style-name="T177">地</text:span><text:span text:style-name="T176">Q4</text:span><text:span text:style-name="T177">】</text:span></text:h>
      <text:h text:style-name="P4" text:outline-level="2" loext:marker-style-name="T20"><text:span text:style-name="T20">7-1 <text:s/></text:span><text:span text:style-name="T21">問題起源：</text:span><text:span text:style-name="T22">普通 </text:span><text:span text:style-name="T23">Heap</text:span><text:span text:style-name="T20"> </text:span><text:span text:style-name="T153">只能快速取一端</text:span></text:h>
      <text:p text:style-name="P5" loext:marker-style-name="T180"><text:span text:style-name="T181">回顧你已學過的 </text:span><text:span text:style-name="T180">Max Heap</text:span><text:span text:style-name="T181">：</text:span></text:p>
      <text:p text:style-name="P37" loext:marker-style-name="T196"><text:span text:style-name="T196"><text:s text:c="11"/>100 <text:s text:c="6"/>← </text:span><text:span text:style-name="T197">Root</text:span><text:span text:style-name="T196"> = 全域最大值（</text:span><text:span text:style-name="T197">O(1) 取得</text:span><text:span text:style-name="T196">）</text:span></text:p>
      <text:p text:style-name="P6"><text:soft-page-break/><text:span text:style-name="T196"><text:s text:c="10"/>/ <text:s text:c="3"/>\</text:span></text:p>
      <text:p text:style-name="P6" loext:marker-style-name="T196"><text:span text:style-name="T196"><text:s text:c="8"/>90 <text:s text:c="5"/>80</text:span><text:span text:style-name="T196"/></text:p>
      <text:p text:style-name="P6" loext:marker-style-name="T196"><text:span text:style-name="T196"><text:s text:c="7"/>/ <text:s/>\</text:span><text:span text:style-name="T196"/></text:p>
      <text:p text:style-name="P6" loext:marker-style-name="T196"><text:span text:style-name="T196"><text:s text:c="6"/>70 <text:s text:c="2"/>60</text:span><text:span text:style-name="T196"/></text:p>
      <text:p text:style-name="P6"/>
      <text:p text:style-name="P6" loext:marker-style-name="T196"><text:span text:style-name="T196"><text:s text:c="2"/>Find-Max <text:s/>= O(1) <text:s/>直接</text:span><text:span text:style-name="T197">看 Root</text:span></text:p>
      <text:p text:style-name="P39" loext:marker-style-name="T196"><text:span text:style-name="T196"><text:s text:c="2"/></text:span><text:span text:style-name="T80">Find-Min <text:s/>= O(n)</text:span><text:span text:style-name="T196"> <text:s/></text:span><text:span text:style-name="T199">最小值藏在某個葉節點，不知在哪，</text:span><text:span text:style-name="T173">只能全掃</text:span></text:p>
      <text:p text:style-name="P7"/>
      <text:p text:style-name="P5" loext:marker-style-name="T180"><text:span text:style-name="T180">Max Heap </text:span><text:span text:style-name="T181">有一個致命弱點：</text:span></text:p>
      <text:list text:style-name="WWNum14">
        <text:list-item>
          <text:p text:style-name="P28" loext:marker-style-name="T180"><text:span text:style-name="T181">取最大值 → </text:span><text:span text:style-name="T180">O(1)</text:span><text:span text:style-name="T181">，非常快，因為 </text:span><text:span text:style-name="T180">Root </text:span><text:span text:style-name="T181">就是最大值。</text:span></text:p>
        </text:list-item>
        <text:list-item>
          <text:p text:style-name="P28" loext:marker-style-name="T180"><text:span text:style-name="T72">取最小值 → </text:span><text:span text:style-name="T73">O(n)</text:span><text:span text:style-name="T181">，</text:span><text:span text:style-name="T89">非常慢，因為最小值可能藏在任何一個葉節點，沒有規律可循。</text:span></text:p>
        </text:list-item>
      </text:list>
      <text:p text:style-name="P7"/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7" loext:marker-style-name="T182"><text:span text:style-name="T182">❓ </text:span><text:span text:style-name="T183">想一想：最小值在哪裡？</text:span></text:p>
            <text:p text:style-name="P7" loext:marker-style-name="T191"><text:span text:style-name="T192">以上面的 </text:span><text:span text:style-name="T191">Max Heap </text:span><text:span text:style-name="T192">為例，最小值 </text:span><text:span text:style-name="T191">60 </text:span><text:span text:style-name="T192">藏在葉節點。</text:span></text:p>
            <text:p text:style-name="P41" loext:marker-style-name="T191"><text:span text:style-name="T192">如果樹有 </text:span><text:span text:style-name="T191">n </text:span><text:span text:style-name="T192">個節點，不掃到最後一層根本不知道最小值在哪。</text:span></text:p>
          </table:table-cell>
        </table:table-row>
      </table:table>
      <text:p text:style-name="P8"/>
      <text:h text:style-name="P4" text:outline-level="2" loext:marker-style-name="T20"><text:span text:style-name="T20">7-2 <text:s/></text:span><text:span text:style-name="T22">現實需求</text:span><text:span text:style-name="T21">：</text:span><text:span text:style-name="T153">兩端都要快</text:span></text:h>
      <text:p text:style-name="P5" loext:marker-style-name="T180"><text:span text:style-name="T181">在</text:span><text:span text:style-name="T184">很多實際應用中</text:span><text:span text:style-name="T181">，我們</text:span><text:span text:style-name="T123">同時需要快速取出最大值和最小值</text:span><text:span text:style-name="T181">：</text:span></text:p>
      <text:p text:style-name="P7"/>
      <text:p text:style-name="P37" loext:marker-style-name="T196"><text:span text:style-name="T196"><text:s text:c="2"/>📈 股票交易系統：</text:span><text:span text:style-name="T196"/></text:p>
      <text:p text:style-name="P6" loext:marker-style-name="T196"><text:span text:style-name="T196"><text:s text:c="7"/>→ 最高價（最大值）O(1) 快速取得</text:span><text:span text:style-name="T196"/></text:p>
      <text:p text:style-name="P6" loext:marker-style-name="T196"><text:span text:style-name="T196"><text:s text:c="7"/>→ 最低價（最小值）O(1) 快速取得</text:span><text:span text:style-name="T196"/></text:p>
      <text:p text:style-name="P6"/>
      <text:p text:style-name="P6" loext:marker-style-name="T196"><text:span text:style-name="T196"><text:s text:c="2"/>🖥️ <text:s/>CPU 排程器（雙優先權模式）：</text:span><text:span text:style-name="T196"/></text:p>
      <text:p text:style-name="P6" loext:marker-style-name="T196"><text:span text:style-name="T196"><text:s text:c="7"/>→ 最高優先權工作 <text:s/>→ 優先執行</text:span><text:span text:style-name="T196"/></text:p>
      <text:p text:style-name="P6" loext:marker-style-name="T196"><text:span text:style-name="T196"><text:s text:c="7"/>→ 最低優先權工作 <text:s/>→ 必要時踢出讓位</text:span><text:span text:style-name="T196"/></text:p>
      <text:p text:style-name="P6"/>
      <text:p text:style-name="P6" loext:marker-style-name="T196"><text:span text:style-name="T196"><text:s text:c="2"/>❌ </text:span><text:span text:style-name="T197">普通 Max Heap</text:span><text:span text:style-name="T196"> 做不到：</text:span><text:span text:style-name="T149">找最小值要</text:span><text:span text:style-name="T173"> O(n)</text:span></text:p>
      <text:p text:style-name="P39" loext:marker-style-name="T196"><text:span text:style-name="T196"><text:s text:c="2"/>❌ </text:span><text:span text:style-name="T197">普通 Min Heap</text:span><text:span text:style-name="T196"> 做不到：</text:span><text:span text:style-name="T149">找最大值要</text:span><text:span text:style-name="T173"> O(n)</text:span></text:p>
      <text:p text:style-name="P7"/>
      <text:p text:style-name="P5" loext:marker-style-name="T180"><text:span text:style-name="T181">這類需求稱為 </text:span><text:span text:style-name="T180">Double-Ended Priority Queue</text:span><text:span text:style-name="T181">（</text:span><text:span text:style-name="T180">DEPQ</text:span><text:span text:style-name="T181">，</text:span><text:span text:style-name="T109">雙端優先佇列</text:span><text:span text:style-name="T181">），</text:span><text:span text:style-name="T89">目標是</text:span><text:span text:style-name="T181">：</text:span></text:p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7" loext:marker-style-name="T182"><text:span text:style-name="T182">Extract-Min</text:span><text:span text:style-name="T183">（</text:span><text:span text:style-name="T154">取出最小值</text:span><text:span text:style-name="T183">）</text:span><text:span text:style-name="T182">= </text:span><text:span text:style-name="T155">O(log n)</text:span></text:p>
            <text:p text:style-name="P41" loext:marker-style-name="T182"><text:span text:style-name="T182">Extract-Max</text:span><text:span text:style-name="T183">（</text:span><text:span text:style-name="T154">取出最大值</text:span><text:span text:style-name="T183">）</text:span><text:span text:style-name="T182">= </text:span><text:span text:style-name="T155">O(log n)</text:span></text:p>
          </table:table-cell>
        </table:table-row>
      </table:table>
      <text:p text:style-name="P8"/>
      <text:h text:style-name="P4" text:outline-level="2" loext:marker-style-name="T20"><text:span text:style-name="T20">7-3 <text:s/>Interval Heap </text:span><text:span text:style-name="T21">的核心設計</text:span></text:h>
      <text:p text:style-name="P5" loext:marker-style-name="T180"><text:span text:style-name="T186">Interval Heap </text:span><text:span text:style-name="T187">的靈感</text:span><text:span text:style-name="T181">：</text:span><text:span text:style-name="T89">把 </text:span><text:span text:style-name="T90">Min Heap </text:span><text:span text:style-name="T89">和 </text:span><text:span text:style-name="T90">Max Heap</text:span><text:span text:style-name="T164">「疊」在同一棵樹上</text:span><text:span text:style-name="T181">。</text:span></text:p>
      <text:p text:style-name="P5" loext:marker-style-name="T180"><text:span text:style-name="T193">具體做法：</text:span><text:span text:style-name="T146">每個節點不再存一個值</text:span><text:span text:style-name="T181">，</text:span><text:span text:style-name="T123">改成存一個「區間」</text:span><text:span text:style-name="T124">[min_val, max_val]</text:span><text:span text:style-name="T181">：</text:span></text:p>
      <text:p text:style-name="P37" loext:marker-style-name="T196"><text:span text:style-name="T196"><text:s text:c="2"/></text:span><text:span text:style-name="T198">普通</text:span><text:span text:style-name="T196"> Heap 節點： <text:s text:c="9"/>Interval Heap 節點：</text:span></text:p>
      <text:p text:style-name="P6" loext:marker-style-name="T196"><text:span text:style-name="T196"><text:s text:c="7"/></text:span><text:span text:style-name="T197">80</text:span><text:span text:style-name="T196"> <text:s text:c="23"/></text:span><text:span text:style-name="T197">[20, 80]</text:span></text:p>
      <text:p text:style-name="P9"><text:s text:c="34"/>左值 <text:s/>右值</text:p>
      <text:p text:style-name="P6" loext:marker-style-name="T196"><text:soft-page-break/><text:span text:style-name="T196"><text:s text:c="30"/>（小的） <text:s/>（大的）</text:span><text:span text:style-name="T196"/></text:p>
      <text:p text:style-name="P6"/>
      <text:p text:style-name="P39" loext:marker-style-name="T196"><text:span text:style-name="T196"><text:s text:c="2"/>規則：</text:span><text:span text:style-name="T201">每個節點的 左值 ≤ 右值</text:span><text:span text:style-name="T202"> </text:span><text:span text:style-name="T196">（必須成立）</text:span></text:p>
      <text:p text:style-name="P7"/>
      <text:p text:style-name="P5" loext:marker-style-name="T180"><text:span text:style-name="T188">兩個 </text:span><text:span text:style-name="T189">Heap </text:span><text:span text:style-name="T188">的同時維護</text:span><text:span text:style-name="T181">：</text:span></text:p>
      <text:list text:continue-numbering="true" text:style-name="WWNum14">
        <text:list-item>
          <text:p text:style-name="P28" loext:marker-style-name="T180"><text:span text:style-name="T184">所有節點的</text:span><text:span text:style-name="T112">左</text:span><text:span text:style-name="T184">值（</text:span><text:span text:style-name="T185">min </text:span><text:span text:style-name="T184">端）</text:span><text:span text:style-name="T181">— 自上而下形成一個 </text:span><text:span text:style-name="T113">Min Heap</text:span></text:p>
        </text:list-item>
        <text:list-item>
          <text:p text:style-name="P28" loext:marker-style-name="T180"><text:span text:style-name="T184">所有節點的</text:span><text:span text:style-name="T135">右</text:span><text:span text:style-name="T184">值（</text:span><text:span text:style-name="T185">max </text:span><text:span text:style-name="T184">端</text:span><text:span text:style-name="T181">）— 自上而下形成一個 </text:span><text:span text:style-name="T136">Max Heap</text:span></text:p>
        </text:list-item>
      </text:list>
      <text:p text:style-name="P7"/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7" loext:marker-style-name="T182"><text:span text:style-name="T182">Interval Heap = </text:span><text:span text:style-name="T114">Min Heap</text:span><text:span text:style-name="T115">（左值）</text:span><text:span text:style-name="T182">+</text:span><text:span text:style-name="T136"> Max Heap</text:span><text:span text:style-name="T137">（右值）</text:span><text:span text:style-name="T203">同時疊在一棵樹上</text:span></text:p>
          </table:table-cell>
        </table:table-row>
      </table:table>
      <text:p text:style-name="P8"/>
      <text:h text:style-name="P4" text:outline-level="2" loext:marker-style-name="T20"><text:span text:style-name="T20">7-4 <text:s/></text:span><text:span text:style-name="T21">整棵樹的結構解析</text:span></text:h>
      <text:p text:style-name="P37" loext:marker-style-name="T196"><text:span text:style-name="T196"><text:s text:c="14"/>[</text:span><text:span text:style-name="T198">10</text:span><text:span text:style-name="T196">, </text:span><text:span text:style-name="T133">100</text:span><text:span text:style-name="T196">] <text:s text:c="9"/>← Root</text:span></text:p>
      <text:p text:style-name="P6" loext:marker-style-name="T196"><text:span text:style-name="T196"><text:s text:c="13"/>/ <text:s text:c="9"/>\</text:span><text:span text:style-name="T196"/></text:p>
      <text:p text:style-name="P39" loext:marker-style-name="T196"><text:span text:style-name="T196"><text:s text:c="8"/>[</text:span><text:span text:style-name="T198">20</text:span><text:span text:style-name="T196">, </text:span><text:span text:style-name="T133">80</text:span><text:span text:style-name="T196">] <text:s text:c="5"/>[</text:span><text:span text:style-name="T198">30</text:span><text:span text:style-name="T196">, </text:span><text:span text:style-name="T133">90</text:span><text:span text:style-name="T196">]</text:span></text:p>
      <text:p text:style-name="P7"/>
      <text:p text:style-name="P5" loext:marker-style-name="T180"><text:span text:style-name="T181">拆開來看左右兩個 </text:span><text:span text:style-name="T180">Heap</text:span><text:span text:style-name="T181">：</text:span></text:p>
      <text:p text:style-name="P37" loext:marker-style-name="T196"><text:span text:style-name="T196"><text:s text:c="2"/></text:span><text:span text:style-name="T200">左值（min 端）形成 Min Heap</text:span><text:span text:style-name="T196">： <text:s text:c="2"/></text:span><text:span text:style-name="T160">右值（max 端）形成 Max Heap</text:span><text:span text:style-name="T196">：</text:span></text:p>
      <text:p text:style-name="P6"/>
      <text:p text:style-name="P6" loext:marker-style-name="T196"><text:span text:style-name="T196"><text:s text:c="10"/>10 <text:s text:c="30"/>100</text:span><text:span text:style-name="T196"/></text:p>
      <text:p text:style-name="P6" loext:marker-style-name="T196"><text:span text:style-name="T196"><text:s text:c="9"/>/ <text:s/>\ <text:s text:c="28"/>/ <text:s text:c="3"/>\</text:span><text:span text:style-name="T196"/></text:p>
      <text:p text:style-name="P6" loext:marker-style-name="T196"><text:span text:style-name="T196"><text:s text:c="8"/>20 <text:s/>30 <text:s text:c="26"/>80 <text:s text:c="4"/>90</text:span><text:span text:style-name="T196"/></text:p>
      <text:p text:style-name="P6"/>
      <text:p text:style-name="P39" loext:marker-style-name="T196"><text:span text:style-name="T196"><text:s text:c="2"/>驗證 Min Heap：10 ≤ 20 ✓ <text:s/>10 ≤ 30 ✓ <text:s text:c="2"/>驗證 Max Heap：100 ≥ 80 ✓ <text:s/>100 ≥ 90 ✓</text:span><text:span text:style-name="T196"/></text:p>
      <text:p text:style-name="P7"/>
      <text:p text:style-name="P5" loext:marker-style-name="T180"><text:span text:style-name="T181">因此：</text:span><text:span text:style-name="T180"/></text:p>
      <text:list text:continue-numbering="true" text:style-name="WWNum14">
        <text:list-item>
          <text:p text:style-name="P28" loext:marker-style-name="T180"><text:span text:style-name="T185">Root </text:span><text:span text:style-name="T184">的</text:span><text:span text:style-name="T112">左</text:span><text:span text:style-name="T184">值</text:span><text:span text:style-name="T181"> </text:span><text:span text:style-name="T180">= </text:span><text:span text:style-name="T116">Min</text:span><text:span text:style-name="T180"> Heap </text:span><text:span text:style-name="T181">的 </text:span><text:span text:style-name="T180">Root = </text:span><text:span text:style-name="T204">全域最小值</text:span><text:span text:style-name="T181"> </text:span><text:span text:style-name="T180">= 10 <text:s/>→ <text:s/>Find-Min = O(1)</text:span></text:p>
        </text:list-item>
        <text:list-item>
          <text:p text:style-name="P28" loext:marker-style-name="T180"><text:span text:style-name="T185">Root </text:span><text:span text:style-name="T184">的</text:span><text:span text:style-name="T135">右</text:span><text:span text:style-name="T184">值</text:span><text:span text:style-name="T181"> </text:span><text:span text:style-name="T180">= </text:span><text:span text:style-name="T138">Max</text:span><text:span text:style-name="T180"> Heap </text:span><text:span text:style-name="T181">的 </text:span><text:span text:style-name="T180">Root = </text:span><text:span text:style-name="T205">全域最大值</text:span><text:span text:style-name="T181"> </text:span><text:span text:style-name="T180">= 100 <text:s/>→ <text:s/>Find-Max = O(1)</text:span></text:p>
        </text:list-item>
      </text:list>
      <text:p text:style-name="P7"/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7" loext:marker-style-name="T182"><text:span text:style-name="T182">🎯 Interval Heap </text:span><text:span text:style-name="T183">的核心價值</text:span></text:p>
            <text:p text:style-name="P7" loext:marker-style-name="T191"><text:span text:style-name="T125">Root </text:span><text:span text:style-name="T126">節點</text:span><text:span text:style-name="T154">同時持有全域最小值（左值）和全域最大值（右值）</text:span><text:span text:style-name="T192">，</text:span></text:p>
            <text:p text:style-name="P41" loext:marker-style-name="T191"><text:span text:style-name="T190">無論取哪一端</text:span><text:span text:style-name="T192">，</text:span><text:span text:style-name="T89">都能 </text:span><text:span text:style-name="T90">O(1) </text:span><text:span text:style-name="T89">找到、</text:span><text:span text:style-name="T90">O(log n) </text:span><text:span text:style-name="T89">取出。</text:span></text:p>
          </table:table-cell>
        </table:table-row>
      </table:table>
      <text:p text:style-name="P8"/>
      <text:h text:style-name="P16" text:outline-level="2" loext:marker-style-name="T17"><text:span text:style-name="T18">7-4.5 <text:s/></text:span><text:span text:style-name="T147">Find 找到 vs. Extract 取出</text:span><text:span text:style-name="T18">：</text:span><text:span text:style-name="T165">為何一個 O(1)、一個 O(log n)</text:span><text:span text:style-name="T18">？</text:span></text:h>
      <text:p text:style-name="P32" loext:marker-style-name="T206"><text:span text:style-name="T207">這是很多人第一次接觸 Heap 時最容易混淆的地方。關鍵在於：</text:span><text:span text:style-name="T107">「找到（Find/Peek）」和「取出（Extract/Delete）」是完全不同的兩件事。</text:span></text:p>
      <text:p text:style-name="P8"/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2" loext:marker-style-name="T5"><text:span text:style-name="T14">先用普通 Max Heap 建立直覺</text:span><text:span text:style-name="T5"/></text:p>
          </table:table-cell>
        </table:table-row>
        <text:soft-page-break/>
        <table:table-row table:style-name="表格30.1">
          <table:table-cell table:style-name="表格30.A1" office:value-type="string">
            <text:p text:style-name="P2"/>
          </table:table-cell>
        </table:table-row>
        <table:table-row table:style-name="表格30.1">
          <table:table-cell table:style-name="表格30.A1" office:value-type="string">
            <text:p text:style-name="P2" loext:marker-style-name="T40"><text:span text:style-name="T51"><text:s text:c="11"/>100 <text:s text:c="2"/>← Root = 全域最大值</text:span><text:span text:style-name="T40"/></text:p>
          </table:table-cell>
        </table:table-row>
        <table:table-row table:style-name="表格30.1">
          <table:table-cell table:style-name="表格30.A1" office:value-type="string">
            <text:p text:style-name="P2" loext:marker-style-name="T40"><text:span text:style-name="T51"><text:s text:c="10"/>/ <text:s text:c="2"/>\</text:span><text:span text:style-name="T40"/></text:p>
          </table:table-cell>
        </table:table-row>
        <table:table-row table:style-name="表格30.1">
          <table:table-cell table:style-name="表格30.A1" office:value-type="string">
            <text:p text:style-name="P2" loext:marker-style-name="T40"><text:span text:style-name="T51"><text:s text:c="8"/>90 <text:s text:c="3"/>80</text:span><text:span text:style-name="T40"/></text:p>
          </table:table-cell>
        </table:table-row>
        <table:table-row table:style-name="表格30.1">
          <table:table-cell table:style-name="表格30.A1" office:value-type="string">
            <text:p text:style-name="P2" loext:marker-style-name="T40"><text:span text:style-name="T51"><text:s text:c="7"/>/ \</text:span><text:span text:style-name="T40"/></text:p>
          </table:table-cell>
        </table:table-row>
        <table:table-row table:style-name="表格30.1">
          <table:table-cell table:style-name="表格30.A1" office:value-type="string">
            <text:p text:style-name="P2" loext:marker-style-name="T40"><text:span text:style-name="T51"><text:s text:c="5"/>70 <text:s/>60</text:span><text:span text:style-name="T40"/></text:p>
          </table:table-cell>
        </table:table-row>
        <table:table-row table:style-name="表格30.1">
          <table:table-cell table:style-name="表格30.A1" office:value-type="string">
            <text:p text:style-name="P2"/>
          </table:table-cell>
        </table:table-row>
        <table:table-row table:style-name="表格30.1">
          <table:table-cell table:style-name="表格30.A1" office:value-type="string">
            <text:p text:style-name="P2" loext:marker-style-name="T40"><text:span text:style-name="T51">Find-Max（找最大值）= O(1)</text:span><text:span text:style-name="T40"/></text:p>
          </table:table-cell>
        </table:table-row>
        <table:table-row table:style-name="表格30.1">
          <table:table-cell table:style-name="表格30.A1" office:value-type="string">
            <text:p text:style-name="P2" loext:marker-style-name="T40"><text:span text:style-name="T51"><text:s text:c="2"/>→ 直接讀 Root，什麼都不用動。</text:span><text:span text:style-name="T40"/></text:p>
          </table:table-cell>
        </table:table-row>
        <table:table-row table:style-name="表格30.1">
          <table:table-cell table:style-name="表格30.A1" office:value-type="string">
            <text:p text:style-name="P2"/>
          </table:table-cell>
        </table:table-row>
        <table:table-row table:style-name="表格30.1">
          <table:table-cell table:style-name="表格30.A1" office:value-type="string">
            <text:p text:style-name="P2" loext:marker-style-name="T40"><text:span text:style-name="T51">Extract-Max（取出最大值）= O(log n)</text:span><text:span text:style-name="T40"/></text:p>
          </table:table-cell>
        </table:table-row>
        <table:table-row table:style-name="表格30.1">
          <table:table-cell table:style-name="表格30.A1" office:value-type="string">
            <text:p text:style-name="P2" loext:marker-style-name="T40"><text:span text:style-name="T51"><text:s text:c="2"/>→ </text:span><text:span text:style-name="T156">要真正把 100 從樹裡刪掉，並維持兩個條件：</text:span></text:p>
          </table:table-cell>
        </table:table-row>
        <table:table-row table:style-name="表格30.1">
          <table:table-cell table:style-name="表格30.A1" office:value-type="string">
            <text:p text:style-name="P2" loext:marker-style-name="T40"><text:span text:style-name="T51"><text:s text:c="4"/>1. </text:span><text:span text:style-name="T208">Complete Binary Tree 結構不能破壞</text:span></text:p>
          </table:table-cell>
        </table:table-row>
        <table:table-row table:style-name="表格30.1">
          <table:table-cell table:style-name="表格30.A1" office:value-type="string">
            <text:p text:style-name="P2" loext:marker-style-name="T40"><text:span text:style-name="T51"><text:s text:c="4"/>2. </text:span><text:span text:style-name="T139">Heap Property（父 ≥ 子）不能違反</text:span></text:p>
          </table:table-cell>
        </table:table-row>
      </table:table>
      <text:p text:style-name="P8"/>
      <text:p text:style-name="P32" loext:marker-style-name="T206"><text:span text:style-name="T98">「取出」的代價遠比「找到」高，是因為</text:span><text:span text:style-name="T167">刪除 Root 後必須完整修復整棵樹的結構。</text:span><text:span text:style-name="T207">流程如下：</text:span></text:p>
      <text:p text:style-name="P8"/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2" loext:marker-style-name="T40"><text:span text:style-name="T51">Extract-Max 完整流程（以上面的 Max Heap 為例）：</text:span><text:span text:style-name="T40"/></text:p>
          </table:table-cell>
        </table:table-row>
        <table:table-row table:style-name="表格31.1">
          <table:table-cell table:style-name="表格31.A1" office:value-type="string">
            <text:p text:style-name="P2"/>
          </table:table-cell>
        </table:table-row>
        <table:table-row table:style-name="表格31.1">
          <table:table-cell table:style-name="表格31.A1" office:value-type="string">
            <text:p text:style-name="P2" loext:marker-style-name="T40"><text:span text:style-name="T51">Step 1：取出 Root = 100</text:span><text:span text:style-name="T40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0"><text:span text:style-name="T51">Step 2：把最後元素（葉節點最右端）60 搬到 Root</text:span><text:span text:style-name="T40"/></text:p>
          </table:table-cell>
        </table:table-row>
        <table:table-row table:style-name="表格31.1">
          <table:table-cell table:style-name="表格31.A1" office:value-type="string">
            <text:p text:style-name="P2"/>
          </table:table-cell>
        </table:table-row>
        <table:table-row table:style-name="表格31.1">
          <table:table-cell table:style-name="表格31.A1" office:value-type="string">
            <text:p text:style-name="P2" loext:marker-style-name="T40"><text:span text:style-name="T51"><text:s text:c="9"/>60 <text:s text:c="2"/>← 60 補位後，Heap Property 壞掉了</text:span><text:span text:style-name="T40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0"><text:span text:style-name="T51"><text:s text:c="8"/>/ <text:s/>\</text:span><text:span text:style-name="T40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0"><text:span text:style-name="T51"><text:s text:c="7"/>90 <text:s/>80</text:span><text:span text:style-name="T40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0"><text:span text:style-name="T51"><text:s text:c="6"/>/</text:span><text:span text:style-name="T40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0"><text:span text:style-name="T51"><text:s text:c="5"/>70</text:span><text:span text:style-name="T40"/></text:p>
          </table:table-cell>
        </table:table-row>
        <table:table-row table:style-name="表格31.1">
          <table:table-cell table:style-name="表格31.A1" office:value-type="string">
            <text:p text:style-name="P2"/>
          </table:table-cell>
        </table:table-row>
        <table:table-row table:style-name="表格31.1">
          <table:table-cell table:style-name="表格31.A1" office:value-type="string">
            <text:p text:style-name="P2" loext:marker-style-name="T40"><text:span text:style-name="T51">Step 3：60 &lt; 90，違反 Max Heap → 與較大子節點 90 交換</text:span><text:span text:style-name="T40"/></text:p>
          </table:table-cell>
        </table:table-row>
        <table:table-row table:style-name="表格31.1">
          <table:table-cell table:style-name="表格31.A1" office:value-type="string">
            <text:p text:style-name="P2"/>
          </table:table-cell>
        </table:table-row>
        <text:soft-page-break/>
        <table:table-row table:style-name="表格31.1">
          <table:table-cell table:style-name="表格31.A1" office:value-type="string">
            <text:p text:style-name="P2" loext:marker-style-name="T40"><text:span text:style-name="T51"><text:s text:c="9"/>90</text:span><text:span text:style-name="T40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0"><text:span text:style-name="T51"><text:s text:c="8"/>/ <text:s/>\</text:span><text:span text:style-name="T40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0"><text:span text:style-name="T51"><text:s text:c="7"/>60 <text:s/>80</text:span><text:span text:style-name="T40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0"><text:span text:style-name="T51"><text:s text:c="6"/>/</text:span><text:span text:style-name="T40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0"><text:span text:style-name="T51"><text:s text:c="5"/>70</text:span><text:span text:style-name="T40"/></text:p>
          </table:table-cell>
        </table:table-row>
        <table:table-row table:style-name="表格31.1">
          <table:table-cell table:style-name="表格31.A1" office:value-type="string">
            <text:p text:style-name="P2"/>
          </table:table-cell>
        </table:table-row>
        <table:table-row table:style-name="表格31.1">
          <table:table-cell table:style-name="表格31.A1" office:value-type="string">
            <text:p text:style-name="P2" loext:marker-style-name="T40"><text:span text:style-name="T51">Step 4：60 &lt; 70，仍違反 → 再往下交換</text:span><text:span text:style-name="T40"/></text:p>
          </table:table-cell>
        </table:table-row>
        <table:table-row table:style-name="表格31.1">
          <table:table-cell table:style-name="表格31.A1" office:value-type="string">
            <text:p text:style-name="P2"/>
          </table:table-cell>
        </table:table-row>
        <table:table-row table:style-name="表格31.1">
          <table:table-cell table:style-name="表格31.A1" office:value-type="string">
            <text:p text:style-name="P2" loext:marker-style-name="T40"><text:span text:style-name="T51"><text:s text:c="9"/>90</text:span><text:span text:style-name="T40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0"><text:span text:style-name="T51"><text:s text:c="8"/>/ <text:s/>\</text:span><text:span text:style-name="T40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0"><text:span text:style-name="T51"><text:s text:c="7"/>70 <text:s/>80</text:span><text:span text:style-name="T40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0"><text:span text:style-name="T51"><text:s text:c="6"/>/</text:span><text:span text:style-name="T40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0"><text:span text:style-name="T51"><text:s text:c="5"/>60 <text:s text:c="2"/>← 60 最終落到葉節點，停止</text:span><text:span text:style-name="T40"/></text:p>
          </table:table-cell>
        </table:table-row>
        <table:table-row table:style-name="表格31.1">
          <table:table-cell table:style-name="表格31.A1" office:value-type="string">
            <text:p text:style-name="P2"/>
          </table:table-cell>
        </table:table-row>
        <table:table-row table:style-name="表格31.1">
          <table:table-cell table:style-name="表格31.A1" office:value-type="string">
            <text:p text:style-name="P2" loext:marker-style-name="T40"><text:span text:style-name="T51">這個「一路往下修正」的過程稱為 Heapify Down（向下沉）。</text:span><text:span text:style-name="T40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0"><text:span text:style-name="T141">最壞情況需走完整棵樹的高度 h = log₂n</text:span><text:span text:style-name="T51">，因此 </text:span><text:span text:style-name="T168">O(log n)</text:span><text:span text:style-name="T51">。</text:span></text:p>
          </table:table-cell>
        </table:table-row>
      </table:table>
      <text:p text:style-name="P8"/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2" loext:marker-style-name="T5"><text:span text:style-name="T14">直覺比喻：</text:span><text:span text:style-name="T5"/></text:p>
          </table:table-cell>
        </table:table-row>
        <table:table-row table:style-name="表格32.1">
          <table:table-cell table:style-name="表格32.A1" office:value-type="string">
            <text:p text:style-name="P2"/>
          </table:table-cell>
        </table:table-row>
        <table:table-row table:style-name="表格32.1">
          <table:table-cell table:style-name="表格32.A1" office:value-type="string">
            <text:p text:style-name="P2" loext:marker-style-name="T40"><text:span text:style-name="T51"><text:s text:c="2"/>Find <text:s text:c="2"/>= 看書架最上面那本書 → O(1)，就在眼前，看一眼即可。</text:span><text:span text:style-name="T40"/></text:p>
          </table:table-cell>
        </table:table-row>
        <table:table-row table:style-name="表格32.1">
          <table:table-cell table:style-name="表格32.A1" office:value-type="string">
            <text:p text:style-name="P2" loext:marker-style-name="T40"><text:span text:style-name="T51"><text:s text:c="2"/></text:span><text:span text:style-name="T52">Extract</text:span><text:span text:style-name="T51"> = </text:span><text:span text:style-name="T151">把那本書抽出來 → O(log n)</text:span></text:p>
          </table:table-cell>
        </table:table-row>
        <table:table-row table:style-name="表格32.1">
          <table:table-cell table:style-name="表格32.A1" office:value-type="string">
            <text:p text:style-name="P2" loext:marker-style-name="T40"><text:span text:style-name="T51"><text:s text:c="11"/></text:span><text:span text:style-name="T156"><text:s/>抽走後，下面的書要重新整理排好，</text:span></text:p>
          </table:table-cell>
        </table:table-row>
        <table:table-row table:style-name="表格32.1">
          <table:table-cell table:style-name="表格32.A1" office:value-type="string">
            <text:p text:style-name="P2" loext:marker-style-name="T40"><text:span text:style-name="T51"><text:s text:c="12"/></text:span><text:span text:style-name="T91">這個「整理」的工作量才是 O(log n) 的真正來源。</text:span></text:p>
          </table:table-cell>
        </table:table-row>
      </table:table>
      <text:p text:style-name="P8"/>
      <text:h text:style-name="P16" text:outline-level="2" loext:marker-style-name="T17"><text:span text:style-name="T18">7-4.6 <text:s/>Interval Heap 的 Extract-Min 與 Extract-Max 完整示範</text:span><text:span text:style-name="T17"/></text:h>
      <text:p text:style-name="P32" loext:marker-style-name="T206"><text:span text:style-name="T207">Interval Heap 的 Extract 操作，本質上就是普通 Heap 的 Heapify Down，只是同時維護 Min 端和 Max 端兩條性質。以下用同一棵初始樹，分別展示兩種操作。</text:span><text:span text:style-name="T206"/></text:p>
      <text:p text:style-name="P8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2" loext:marker-style-name="T5"><text:span text:style-name="T14">初始 Interval Heap：</text:span><text:span text:style-name="T5"/></text:p>
          </table:table-cell>
        </table:table-row>
        <table:table-row table:style-name="表格33.1">
          <table:table-cell table:style-name="表格33.A1" office:value-type="string">
            <text:p text:style-name="P2"/>
          </table:table-cell>
        </table:table-row>
        <table:table-row table:style-name="表格33.1">
          <table:table-cell table:style-name="表格33.A1" office:value-type="string">
            <text:p text:style-name="P2" loext:marker-style-name="T40"><text:span text:style-name="T51"><text:s text:c="13"/>[10, 100] <text:s text:c="6"/>← Root</text:span><text:span text:style-name="T40"/></text:p>
          </table:table-cell>
        </table:table-row>
        <text:soft-page-break/>
        <table:table-row table:style-name="表格33.1">
          <table:table-cell table:style-name="表格33.A1" office:value-type="string">
            <text:p text:style-name="P2" loext:marker-style-name="T40"><text:span text:style-name="T51"><text:s text:c="12"/>/ <text:s text:c="9"/>\</text:span><text:span text:style-name="T40"/></text:p>
          </table:table-cell>
        </table:table-row>
        <table:table-row table:style-name="表格33.1">
          <table:table-cell table:style-name="表格33.A1" office:value-type="string">
            <text:p text:style-name="P2" loext:marker-style-name="T40"><text:span text:style-name="T51"><text:s text:c="7"/>[20, 80] <text:s text:c="5"/>[30, 90]</text:span><text:span text:style-name="T40"/></text:p>
          </table:table-cell>
        </table:table-row>
        <table:table-row table:style-name="表格33.1">
          <table:table-cell table:style-name="表格33.A1" office:value-type="string">
            <text:p text:style-name="P2"/>
          </table:table-cell>
        </table:table-row>
        <table:table-row table:style-name="表格33.1">
          <table:table-cell table:style-name="表格33.A1" office:value-type="string">
            <text:p text:style-name="P2" loext:marker-style-name="T40"><text:span text:style-name="T51">左值（min 端）形成 Min Heap： <text:s/>10 ≤ 20，10 ≤ 30 ✓</text:span><text:span text:style-name="T40"/></text:p>
          </table:table-cell>
        </table:table-row>
        <table:table-row table:style-name="表格33.1">
          <table:table-cell table:style-name="表格33.A1" office:value-type="string">
            <text:p text:style-name="P2" loext:marker-style-name="T40"><text:span text:style-name="T51">右值（max 端）形成 Max Heap： <text:s/>100 ≥ 80，100 ≥ 90 ✓</text:span><text:span text:style-name="T40"/></text:p>
          </table:table-cell>
        </table:table-row>
        <table:table-row table:style-name="表格33.1">
          <table:table-cell table:style-name="表格33.A1" office:value-type="string">
            <text:p text:style-name="P2"/>
          </table:table-cell>
        </table:table-row>
        <table:table-row table:style-name="表格33.1">
          <table:table-cell table:style-name="表格33.A1" office:value-type="string">
            <text:p text:style-name="P2" loext:marker-style-name="T40"><text:span text:style-name="T51">全域最小值 = Root 左值 = 10</text:span><text:span text:style-name="T40"/></text:p>
          </table:table-cell>
        </table:table-row>
        <table:table-row table:style-name="表格33.1">
          <table:table-cell table:style-name="表格33.A1" office:value-type="string">
            <text:p text:style-name="P2" loext:marker-style-name="T40"><text:span text:style-name="T51">全域最大值 = Root 右值 = 100</text:span><text:span text:style-name="T40"/></text:p>
          </table:table-cell>
        </table:table-row>
      </table:table>
      <text:p text:style-name="P8"/>
      <text:h text:style-name="P16" text:outline-level="2" loext:marker-style-name="T17"><text:span text:style-name="T18"><text:s text:c="2"/>一、Extract-Min（</text:span><text:span text:style-name="T19">取出最小值 10</text:span><text:span text:style-name="T18">）</text:span></text:h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2" loext:marker-style-name="T40"><text:span text:style-name="T51">Step 1：</text:span><text:span text:style-name="T211">取出 Root 左值（最小值）= 10</text:span></text:p>
          </table:table-cell>
        </table:table-row>
        <table:table-row table:style-name="表格34.1">
          <table:table-cell table:style-name="表格34.A1" office:value-type="string">
            <text:p text:style-name="P2" loext:marker-style-name="T40"><text:span text:style-name="T51"><text:s text:c="8"/>Root 左側空洞，需要補位。</text:span><text:span text:style-name="T40"/></text:p>
          </table:table-cell>
        </table:table-row>
        <table:table-row table:style-name="表格34.1">
          <table:table-cell table:style-name="表格34.A1" office:value-type="string">
            <text:p text:style-name="P2"/>
          </table:table-cell>
        </table:table-row>
        <table:table-row table:style-name="表格34.1">
          <table:table-cell table:style-name="表格34.A1" office:value-type="string">
            <text:p text:style-name="P2" loext:marker-style-name="T40"><text:span text:style-name="T51"><text:s text:c="11"/>[ ?, 100]</text:span><text:span text:style-name="T40"/></text:p>
          </table:table-cell>
        </table:table-row>
        <table:table-row table:style-name="表格34.1">
          <table:table-cell table:style-name="表格34.A1" office:value-type="string">
            <text:p text:style-name="P2" loext:marker-style-name="T40"><text:span text:style-name="T51"><text:s text:c="11"/>/ <text:s text:c="7"/>\</text:span><text:span text:style-name="T40"/></text:p>
          </table:table-cell>
        </table:table-row>
        <table:table-row table:style-name="表格34.1">
          <table:table-cell table:style-name="表格34.A1" office:value-type="string">
            <text:p text:style-name="P2" loext:marker-style-name="T40"><text:span text:style-name="T51"><text:s text:c="6"/>[20, 80] <text:s text:c="3"/>[30, 90]</text:span><text:span text:style-name="T40"/></text:p>
          </table:table-cell>
        </table:table-row>
        <table:table-row table:style-name="表格34.1">
          <table:table-cell table:style-name="表格34.A1" office:value-type="string">
            <text:p text:style-name="P2"/>
          </table:table-cell>
        </table:table-row>
        <table:table-row table:style-name="表格34.1">
          <table:table-cell table:style-name="表格34.A1" office:value-type="string">
            <text:p text:style-name="P2" loext:marker-style-name="T40"><text:span text:style-name="T51">Step 2：補位規則</text:span><text:span text:style-name="T40"/></text:p>
          </table:table-cell>
        </table:table-row>
        <table:table-row table:style-name="表格34.1">
          <table:table-cell table:style-name="表格34.A1" office:value-type="string">
            <text:p text:style-name="P2" loext:marker-style-name="T40"><text:span text:style-name="T51"><text:s text:c="8"/>把最後節點（[30, 90]）整體移除，</text:span><text:span text:style-name="T40"/></text:p>
          </table:table-cell>
        </table:table-row>
        <table:table-row table:style-name="表格34.1">
          <table:table-cell table:style-name="表格34.A1" office:value-type="string">
            <text:p text:style-name="P2" loext:marker-style-name="T40"><text:span text:style-name="T51"><text:s text:c="8"/>取其 min 端（30）補到 Root 的左值位置。</text:span><text:span text:style-name="T40"/></text:p>
          </table:table-cell>
        </table:table-row>
        <table:table-row table:style-name="表格34.1">
          <table:table-cell table:style-name="表格34.A1" office:value-type="string">
            <text:p text:style-name="P2" loext:marker-style-name="T40"><text:span text:style-name="T51"><text:s text:c="8"/>（補 min 端修的是 Min Heap；補 max 端修的是 Max Heap）</text:span><text:span text:style-name="T40"/></text:p>
          </table:table-cell>
        </table:table-row>
        <table:table-row table:style-name="表格34.1">
          <table:table-cell table:style-name="表格34.A1" office:value-type="string">
            <text:p text:style-name="P2"/>
          </table:table-cell>
        </table:table-row>
        <table:table-row table:style-name="表格34.1">
          <table:table-cell table:style-name="表格34.A1" office:value-type="string">
            <text:p text:style-name="P2" loext:marker-style-name="T40"><text:span text:style-name="T51"><text:s text:c="11"/>[30, 100]</text:span><text:span text:style-name="T40"/></text:p>
          </table:table-cell>
        </table:table-row>
        <table:table-row table:style-name="表格34.1">
          <table:table-cell table:style-name="表格34.A1" office:value-type="string">
            <text:p text:style-name="P2" loext:marker-style-name="T40"><text:span text:style-name="T51"><text:s text:c="11"/>/</text:span><text:span text:style-name="T40"/></text:p>
          </table:table-cell>
        </table:table-row>
        <table:table-row table:style-name="表格34.1">
          <table:table-cell table:style-name="表格34.A1" office:value-type="string">
            <text:p text:style-name="P2" loext:marker-style-name="T40"><text:span text:style-name="T51"><text:s text:c="6"/>[20, 80]</text:span><text:span text:style-name="T40"/></text:p>
          </table:table-cell>
        </table:table-row>
        <table:table-row table:style-name="表格34.1">
          <table:table-cell table:style-name="表格34.A1" office:value-type="string">
            <text:p text:style-name="P2"/>
          </table:table-cell>
        </table:table-row>
        <table:table-row table:style-name="表格34.1">
          <table:table-cell table:style-name="表格34.A1" office:value-type="string">
            <text:p text:style-name="P2" loext:marker-style-name="T40"><text:span text:style-name="T51">Step 3：檢查 Min Heap 性質</text:span><text:span text:style-name="T40"/></text:p>
          </table:table-cell>
        </table:table-row>
        <table:table-row table:style-name="表格34.1">
          <table:table-cell table:style-name="表格34.A1" office:value-type="string">
            <text:p text:style-name="P2" loext:marker-style-name="T40"><text:span text:style-name="T51"><text:s text:c="8"/>Root min = 30，Child min = 20</text:span><text:span text:style-name="T40"/></text:p>
          </table:table-cell>
        </table:table-row>
        <table:table-row table:style-name="表格34.1">
          <table:table-cell table:style-name="表格34.A1" office:value-type="string">
            <text:p text:style-name="P2" loext:marker-style-name="T40"><text:span text:style-name="T51"><text:s text:c="8"/></text:span><text:span text:style-name="T111">30 &gt; 20 → 違反 Min Heap（父 ≤ 子）</text:span><text:span text:style-name="T51">→ </text:span><text:span text:style-name="T93">交換 min 端</text:span></text:p>
          </table:table-cell>
        </table:table-row>
        <table:table-row table:style-name="表格34.1">
          <table:table-cell table:style-name="表格34.A1" office:value-type="string">
            <text:p text:style-name="P2"/>
          </table:table-cell>
        </table:table-row>
        <text:soft-page-break/>
        <table:table-row table:style-name="表格34.1">
          <table:table-cell table:style-name="表格34.A1" office:value-type="string">
            <text:p text:style-name="P2" loext:marker-style-name="T40"><text:span text:style-name="T51">Step 4：Heapify Down（min 端下沉）</text:span><text:span text:style-name="T40"/></text:p>
          </table:table-cell>
        </table:table-row>
        <table:table-row table:style-name="表格34.1">
          <table:table-cell table:style-name="表格34.A1" office:value-type="string">
            <text:p text:style-name="P2"/>
          </table:table-cell>
        </table:table-row>
        <table:table-row table:style-name="表格34.1">
          <table:table-cell table:style-name="表格34.A1" office:value-type="string">
            <text:p text:style-name="P2" loext:marker-style-name="T40"><text:span text:style-name="T51"><text:s text:c="11"/>[20, 100]</text:span><text:span text:style-name="T40"/></text:p>
          </table:table-cell>
        </table:table-row>
        <table:table-row table:style-name="表格34.1">
          <table:table-cell table:style-name="表格34.A1" office:value-type="string">
            <text:p text:style-name="P2" loext:marker-style-name="T40"><text:span text:style-name="T51"><text:s text:c="11"/>/</text:span><text:span text:style-name="T40"/></text:p>
          </table:table-cell>
        </table:table-row>
        <table:table-row table:style-name="表格34.1">
          <table:table-cell table:style-name="表格34.A1" office:value-type="string">
            <text:p text:style-name="P2" loext:marker-style-name="T40"><text:span text:style-name="T51"><text:s text:c="6"/>[30, 80]</text:span><text:span text:style-name="T40"/></text:p>
          </table:table-cell>
        </table:table-row>
        <table:table-row table:style-name="表格34.1">
          <table:table-cell table:style-name="表格34.A1" office:value-type="string">
            <text:p text:style-name="P2"/>
          </table:table-cell>
        </table:table-row>
        <table:table-row table:style-name="表格34.1">
          <table:table-cell table:style-name="表格34.A1" office:value-type="string">
            <text:p text:style-name="P2" loext:marker-style-name="T40"><text:span text:style-name="T51"><text:s text:c="8"/>20 ≤ 30 → 合法，停止。</text:span><text:span text:style-name="T40"/></text:p>
          </table:table-cell>
        </table:table-row>
        <table:table-row table:style-name="表格34.1">
          <table:table-cell table:style-name="表格34.A1" office:value-type="string">
            <text:p text:style-name="P2"/>
          </table:table-cell>
        </table:table-row>
        <table:table-row table:style-name="表格34.1">
          <table:table-cell table:style-name="表格34.A1" office:value-type="string">
            <text:p text:style-name="P2" loext:marker-style-name="T40"><text:span text:style-name="T51">最終結果：</text:span><text:span text:style-name="T40"/></text:p>
          </table:table-cell>
        </table:table-row>
        <table:table-row table:style-name="表格34.1">
          <table:table-cell table:style-name="表格34.A1" office:value-type="string">
            <text:p text:style-name="P2" loext:marker-style-name="T40"><text:span text:style-name="T51"><text:s text:c="11"/>[20, 100]</text:span><text:span text:style-name="T40"/></text:p>
          </table:table-cell>
        </table:table-row>
        <table:table-row table:style-name="表格34.1">
          <table:table-cell table:style-name="表格34.A1" office:value-type="string">
            <text:p text:style-name="P2" loext:marker-style-name="T40"><text:span text:style-name="T51"><text:s text:c="11"/>/</text:span><text:span text:style-name="T40"/></text:p>
          </table:table-cell>
        </table:table-row>
        <table:table-row table:style-name="表格34.1">
          <table:table-cell table:style-name="表格34.A1" office:value-type="string">
            <text:p text:style-name="P2" loext:marker-style-name="T40"><text:span text:style-name="T51"><text:s text:c="6"/>[30, 80]</text:span><text:span text:style-name="T40"/></text:p>
          </table:table-cell>
        </table:table-row>
        <table:table-row table:style-name="表格34.1">
          <table:table-cell table:style-name="表格34.A1" office:value-type="string">
            <text:p text:style-name="P2"/>
          </table:table-cell>
        </table:table-row>
        <table:table-row table:style-name="表格34.1">
          <table:table-cell table:style-name="表格34.A1" office:value-type="string">
            <text:p text:style-name="P2" loext:marker-style-name="T40"><text:span text:style-name="T51">成功取出最小值 10，</text:span><text:span text:style-name="T156">Min Heap 與 Max Heap 性質皆完整恢復</text:span><text:span text:style-name="T51">。</text:span></text:p>
          </table:table-cell>
        </table:table-row>
      </table:table>
      <text:p text:style-name="P8"/>
      <text:h text:style-name="P16" text:outline-level="2" loext:marker-style-name="T17"><text:span text:style-name="T18"><text:s text:c="2"/>二、Extract-Max（</text:span><text:span text:style-name="T19">取出最大值 100</text:span><text:span text:style-name="T18">）</text:span>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2" loext:marker-style-name="T40"><text:span text:style-name="T51">使用同一棵初始樹：</text:span><text:span text:style-name="T40"/></text:p>
          </table:table-cell>
        </table:table-row>
        <table:table-row table:style-name="表格35.1">
          <table:table-cell table:style-name="表格35.A1" office:value-type="string">
            <text:p text:style-name="P2"/>
          </table:table-cell>
        </table:table-row>
        <table:table-row table:style-name="表格35.1">
          <table:table-cell table:style-name="表格35.A1" office:value-type="string">
            <text:p text:style-name="P2" loext:marker-style-name="T40"><text:span text:style-name="T51"><text:s text:c="13"/>[10, 100]</text:span><text:span text:style-name="T40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0"><text:span text:style-name="T51"><text:s text:c="12"/>/ <text:s text:c="9"/>\</text:span><text:span text:style-name="T40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0"><text:span text:style-name="T51"><text:s text:c="7"/>[20, 80] <text:s text:c="5"/>[30, 90]</text:span><text:span text:style-name="T40"/></text:p>
          </table:table-cell>
        </table:table-row>
        <table:table-row table:style-name="表格35.1">
          <table:table-cell table:style-name="表格35.A1" office:value-type="string">
            <text:p text:style-name="P2"/>
          </table:table-cell>
        </table:table-row>
        <table:table-row table:style-name="表格35.1">
          <table:table-cell table:style-name="表格35.A1" office:value-type="string">
            <text:p text:style-name="P2" loext:marker-style-name="T40"><text:span text:style-name="T51">Step 1：</text:span><text:span text:style-name="T211">取出 Root 右值（最大值）= 100</text:span></text:p>
          </table:table-cell>
        </table:table-row>
        <table:table-row table:style-name="表格35.1">
          <table:table-cell table:style-name="表格35.A1" office:value-type="string">
            <text:p text:style-name="P2" loext:marker-style-name="T40"><text:span text:style-name="T51"><text:s text:c="8"/>Root 右側空洞，需要補位。</text:span><text:span text:style-name="T40"/></text:p>
          </table:table-cell>
        </table:table-row>
        <table:table-row table:style-name="表格35.1">
          <table:table-cell table:style-name="表格35.A1" office:value-type="string">
            <text:p text:style-name="P2"/>
          </table:table-cell>
        </table:table-row>
        <table:table-row table:style-name="表格35.1">
          <table:table-cell table:style-name="表格35.A1" office:value-type="string">
            <text:p text:style-name="P2" loext:marker-style-name="T40"><text:span text:style-name="T51"><text:s text:c="11"/>[10, <text:s/>? ]</text:span><text:span text:style-name="T40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0"><text:span text:style-name="T51"><text:s text:c="11"/>/ <text:s text:c="7"/>\</text:span><text:span text:style-name="T40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0"><text:span text:style-name="T51"><text:s text:c="6"/>[20, 80] <text:s text:c="3"/>[30, 90]</text:span><text:span text:style-name="T40"/></text:p>
          </table:table-cell>
        </table:table-row>
        <table:table-row table:style-name="表格35.1">
          <table:table-cell table:style-name="表格35.A1" office:value-type="string">
            <text:p text:style-name="P2"/>
          </table:table-cell>
        </table:table-row>
        <table:table-row table:style-name="表格35.1">
          <table:table-cell table:style-name="表格35.A1" office:value-type="string">
            <text:p text:style-name="P2" loext:marker-style-name="T40"><text:span text:style-name="T51">Step 2：補位規則</text:span><text:span text:style-name="T40"/></text:p>
          </table:table-cell>
        </table:table-row>
        <text:soft-page-break/>
        <table:table-row table:style-name="表格35.1">
          <table:table-cell table:style-name="表格35.A1" office:value-type="string">
            <text:p text:style-name="P2" loext:marker-style-name="T40"><text:span text:style-name="T51"><text:s text:c="8"/>把最後節點（[30, 90]）整體移除，</text:span><text:span text:style-name="T40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0"><text:span text:style-name="T51"><text:s text:c="8"/>取其 max 端（90）補到 Root 的右值位置。</text:span><text:span text:style-name="T40"/></text:p>
          </table:table-cell>
        </table:table-row>
        <table:table-row table:style-name="表格35.1">
          <table:table-cell table:style-name="表格35.A1" office:value-type="string">
            <text:p text:style-name="P2"/>
          </table:table-cell>
        </table:table-row>
        <table:table-row table:style-name="表格35.1">
          <table:table-cell table:style-name="表格35.A1" office:value-type="string">
            <text:p text:style-name="P2" loext:marker-style-name="T40"><text:span text:style-name="T51"><text:s text:c="11"/>[10, 90]</text:span><text:span text:style-name="T40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0"><text:span text:style-name="T51"><text:s text:c="11"/>/</text:span><text:span text:style-name="T40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0"><text:span text:style-name="T51"><text:s text:c="6"/>[20, 80]</text:span><text:span text:style-name="T40"/></text:p>
          </table:table-cell>
        </table:table-row>
        <table:table-row table:style-name="表格35.1">
          <table:table-cell table:style-name="表格35.A1" office:value-type="string">
            <text:p text:style-name="P2"/>
          </table:table-cell>
        </table:table-row>
        <table:table-row table:style-name="表格35.1">
          <table:table-cell table:style-name="表格35.A1" office:value-type="string">
            <text:p text:style-name="P2" loext:marker-style-name="T40"><text:span text:style-name="T51">Step 3：檢查 Max Heap 性質</text:span><text:span text:style-name="T40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0"><text:span text:style-name="T51"><text:s text:c="8"/>Root max = 90，Child max = 80</text:span><text:span text:style-name="T40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0"><text:span text:style-name="T51"><text:s text:c="8"/>90 ≥ 80 → 符合 Max Heap → 無需交換，停止。</text:span><text:span text:style-name="T40"/></text:p>
          </table:table-cell>
        </table:table-row>
        <table:table-row table:style-name="表格35.1">
          <table:table-cell table:style-name="表格35.A1" office:value-type="string">
            <text:p text:style-name="P2"/>
          </table:table-cell>
        </table:table-row>
        <table:table-row table:style-name="表格35.1">
          <table:table-cell table:style-name="表格35.A1" office:value-type="string">
            <text:p text:style-name="P2" loext:marker-style-name="T40"><text:span text:style-name="T51">最終結果：</text:span><text:span text:style-name="T40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0"><text:span text:style-name="T51"><text:s text:c="11"/>[10, 90]</text:span><text:span text:style-name="T40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0"><text:span text:style-name="T51"><text:s text:c="11"/>/</text:span><text:span text:style-name="T40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0"><text:span text:style-name="T51"><text:s text:c="6"/>[20, 80]</text:span><text:span text:style-name="T40"/></text:p>
          </table:table-cell>
        </table:table-row>
        <table:table-row table:style-name="表格35.1">
          <table:table-cell table:style-name="表格35.A1" office:value-type="string">
            <text:p text:style-name="P2"/>
          </table:table-cell>
        </table:table-row>
        <table:table-row table:style-name="表格35.1">
          <table:table-cell table:style-name="表格35.A1" office:value-type="string">
            <text:p text:style-name="P2" loext:marker-style-name="T40"><text:span text:style-name="T51">成功取出最大值 100，</text:span><text:span text:style-name="T156">結構完整</text:span><text:span text:style-name="T51">。</text:span></text:p>
          </table:table-cell>
        </table:table-row>
      </table:table>
      <text:p text:style-name="P8"/>
      <text:h text:style-name="P16" text:outline-level="2" loext:marker-style-name="T17"><text:span text:style-name="T18"><text:s text:c="2"/>三、Extract-Max 的下沉範例（需多次 Heapify）</text:span><text:span text:style-name="T17"/></text:h>
      <text:p text:style-name="P32" loext:marker-style-name="T206"><text:span text:style-name="T207">上例的 Max Heap 恰好不需要下沉。以下補充一個「確實需要多次下沉」的案例，更能體現 O(log n) 的代價：</text:span><text:span text:style-name="T206"/></text:p>
      <text:p text:style-name="P8"/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2" loext:marker-style-name="T40"><text:span text:style-name="T51">初始 Interval Heap（5 個節點）：</text:span><text:span text:style-name="T40"/></text:p>
          </table:table-cell>
        </table:table-row>
        <table:table-row table:style-name="表格36.1">
          <table:table-cell table:style-name="表格36.A1" office:value-type="string">
            <text:p text:style-name="P2"/>
          </table:table-cell>
        </table:table-row>
        <table:table-row table:style-name="表格36.1">
          <table:table-cell table:style-name="表格36.A1" office:value-type="string">
            <text:p text:style-name="P2" loext:marker-style-name="T40"><text:span text:style-name="T51"><text:s text:c="14"/>[10, 100]</text:span><text:span text:style-name="T40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0"><text:span text:style-name="T51"><text:s text:c="13"/>/ <text:s text:c="9"/>\</text:span><text:span text:style-name="T40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0"><text:span text:style-name="T51"><text:s text:c="8"/>[20, 95] <text:s text:c="5"/>[30, 90]</text:span><text:span text:style-name="T40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0"><text:span text:style-name="T51"><text:s text:c="8"/>/ <text:s text:c="6"/>\</text:span><text:span text:style-name="T40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0"><text:span text:style-name="T51"><text:s text:c="3"/>[40, 85] <text:s/>[50, 70]</text:span><text:span text:style-name="T40"/></text:p>
          </table:table-cell>
        </table:table-row>
        <table:table-row table:style-name="表格36.1">
          <table:table-cell table:style-name="表格36.A1" office:value-type="string">
            <text:p text:style-name="P2"/>
          </table:table-cell>
        </table:table-row>
        <table:table-row table:style-name="表格36.1">
          <table:table-cell table:style-name="表格36.A1" office:value-type="string">
            <text:p text:style-name="P2" loext:marker-style-name="T40"><text:span text:style-name="T51">Step 1：取出 Root max = 100</text:span><text:span text:style-name="T40"/></text:p>
          </table:table-cell>
        </table:table-row>
        <text:soft-page-break/>
        <table:table-row table:style-name="表格36.1">
          <table:table-cell table:style-name="表格36.A1" office:value-type="string">
            <text:p text:style-name="P2" loext:marker-style-name="T40"><text:span text:style-name="T51">Step 2：最後節點 [50, 70] 移除，取其 max 端 70 補到 Root。</text:span><text:span text:style-name="T40"/></text:p>
          </table:table-cell>
        </table:table-row>
        <table:table-row table:style-name="表格36.1">
          <table:table-cell table:style-name="表格36.A1" office:value-type="string">
            <text:p text:style-name="P2"/>
          </table:table-cell>
        </table:table-row>
        <table:table-row table:style-name="表格36.1">
          <table:table-cell table:style-name="表格36.A1" office:value-type="string">
            <text:p text:style-name="P2" loext:marker-style-name="T40"><text:span text:style-name="T51"><text:s text:c="14"/>[10, 70]</text:span><text:span text:style-name="T40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0"><text:span text:style-name="T51"><text:s text:c="13"/>/ <text:s text:c="9"/>\</text:span><text:span text:style-name="T40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0"><text:span text:style-name="T51"><text:s text:c="8"/>[20, 95] <text:s text:c="5"/>[30, 90]</text:span><text:span text:style-name="T40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0"><text:span text:style-name="T51"><text:s text:c="8"/>/</text:span><text:span text:style-name="T40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0"><text:span text:style-name="T51"><text:s text:c="3"/>[40, 85]</text:span><text:span text:style-name="T40"/></text:p>
          </table:table-cell>
        </table:table-row>
        <table:table-row table:style-name="表格36.1">
          <table:table-cell table:style-name="表格36.A1" office:value-type="string">
            <text:p text:style-name="P2"/>
          </table:table-cell>
        </table:table-row>
        <table:table-row table:style-name="表格36.1">
          <table:table-cell table:style-name="表格36.A1" office:value-type="string">
            <text:p text:style-name="P2" loext:marker-style-name="T40"><text:span text:style-name="T51">Step 3：Root max = 70，子節點 max：左=95，右=90</text:span><text:span text:style-name="T40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0"><text:span text:style-name="T51"><text:s text:c="8"/>較大子節點 max = 95 &gt; 70 → 違反 Max Heap → 70 與 95 交換</text:span><text:span text:style-name="T40"/></text:p>
          </table:table-cell>
        </table:table-row>
        <table:table-row table:style-name="表格36.1">
          <table:table-cell table:style-name="表格36.A1" office:value-type="string">
            <text:p text:style-name="P2"/>
          </table:table-cell>
        </table:table-row>
        <table:table-row table:style-name="表格36.1">
          <table:table-cell table:style-name="表格36.A1" office:value-type="string">
            <text:p text:style-name="P2" loext:marker-style-name="T40"><text:span text:style-name="T51"><text:s text:c="14"/>[10, 95]</text:span><text:span text:style-name="T40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0"><text:span text:style-name="T51"><text:s text:c="13"/>/ <text:s text:c="9"/>\</text:span><text:span text:style-name="T40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0"><text:span text:style-name="T51"><text:s text:c="8"/>[20, 70] <text:s text:c="5"/>[30, 90]</text:span><text:span text:style-name="T40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0"><text:span text:style-name="T51"><text:s text:c="8"/>/</text:span><text:span text:style-name="T40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0"><text:span text:style-name="T51"><text:s text:c="3"/>[40, 85]</text:span><text:span text:style-name="T40"/></text:p>
          </table:table-cell>
        </table:table-row>
        <table:table-row table:style-name="表格36.1">
          <table:table-cell table:style-name="表格36.A1" office:value-type="string">
            <text:p text:style-name="P2"/>
          </table:table-cell>
        </table:table-row>
        <table:table-row table:style-name="表格36.1">
          <table:table-cell table:style-name="表格36.A1" office:value-type="string">
            <text:p text:style-name="P2" loext:marker-style-name="T40"><text:span text:style-name="T51">Step 4：[20, 70] 的 max = 70，子節點 max：左=85</text:span><text:span text:style-name="T40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0"><text:span text:style-name="T51"><text:s text:c="8"/>85 &gt; 70 → 仍違反 → 70 與 85 交換</text:span><text:span text:style-name="T40"/></text:p>
          </table:table-cell>
        </table:table-row>
        <table:table-row table:style-name="表格36.1">
          <table:table-cell table:style-name="表格36.A1" office:value-type="string">
            <text:p text:style-name="P2"/>
          </table:table-cell>
        </table:table-row>
        <table:table-row table:style-name="表格36.1">
          <table:table-cell table:style-name="表格36.A1" office:value-type="string">
            <text:p text:style-name="P2" loext:marker-style-name="T40"><text:span text:style-name="T51"><text:s text:c="14"/>[10, 95]</text:span><text:span text:style-name="T40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0"><text:span text:style-name="T51"><text:s text:c="13"/>/ <text:s text:c="9"/>\</text:span><text:span text:style-name="T40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0"><text:span text:style-name="T51"><text:s text:c="8"/>[20, 85] <text:s text:c="5"/>[30, 90]</text:span><text:span text:style-name="T40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0"><text:span text:style-name="T51"><text:s text:c="8"/>/</text:span><text:span text:style-name="T40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0"><text:span text:style-name="T51"><text:s text:c="3"/>[40, 70]</text:span><text:span text:style-name="T40"/></text:p>
          </table:table-cell>
        </table:table-row>
        <table:table-row table:style-name="表格36.1">
          <table:table-cell table:style-name="表格36.A1" office:value-type="string">
            <text:p text:style-name="P2"/>
          </table:table-cell>
        </table:table-row>
        <table:table-row table:style-name="表格36.1">
          <table:table-cell table:style-name="表格36.A1" office:value-type="string">
            <text:p text:style-name="P2" loext:marker-style-name="T40"><text:span text:style-name="T51">Step 5：[40, 70] 已是葉節點 → 停止。</text:span><text:span text:style-name="T40"/></text:p>
          </table:table-cell>
        </table:table-row>
        <table:table-row table:style-name="表格36.1">
          <table:table-cell table:style-name="表格36.A1" office:value-type="string">
            <text:p text:style-name="P2"/>
          </table:table-cell>
        </table:table-row>
        <table:table-row table:style-name="表格36.1">
          <table:table-cell table:style-name="表格36.A1" office:value-type="string">
            <text:p text:style-name="P2" loext:marker-style-name="T40"><text:span text:style-name="T51">最終結果：</text:span><text:span text:style-name="T40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0"><text:span text:style-name="T51"><text:s text:c="14"/>[10, 95]</text:span><text:span text:style-name="T40"/></text:p>
          </table:table-cell>
        </table:table-row>
        <text:soft-page-break/>
        <table:table-row table:style-name="表格36.1">
          <table:table-cell table:style-name="表格36.A1" office:value-type="string">
            <text:p text:style-name="P2" loext:marker-style-name="T40"><text:span text:style-name="T51"><text:s text:c="13"/>/ <text:s text:c="9"/>\</text:span><text:span text:style-name="T40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0"><text:span text:style-name="T51"><text:s text:c="8"/>[20, 85] <text:s text:c="5"/>[30, 90]</text:span><text:span text:style-name="T40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0"><text:span text:style-name="T51"><text:s text:c="8"/>/</text:span><text:span text:style-name="T40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0"><text:span text:style-name="T51"><text:s text:c="3"/>[40, 70]</text:span><text:span text:style-name="T40"/></text:p>
          </table:table-cell>
        </table:table-row>
        <table:table-row table:style-name="表格36.1">
          <table:table-cell table:style-name="表格36.A1" office:value-type="string">
            <text:p text:style-name="P2"/>
          </table:table-cell>
        </table:table-row>
        <table:table-row table:style-name="表格36.1">
          <table:table-cell table:style-name="表格36.A1" office:value-type="string">
            <text:p text:style-name="P2" loext:marker-style-name="T40"><text:span text:style-name="T51">全域最大值已更新為 95。</text:span><text:span text:style-name="T40"/></text:p>
          </table:table-cell>
        </table:table-row>
      </table:table>
      <text:p text:style-name="P8"/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2" loext:marker-style-name="T5"><text:span text:style-name="T14">公職考試必記：Find vs. Extract 時間一覽</text:span><text:span text:style-name="T5"/></text:p>
          </table:table-cell>
        </table:table-row>
        <table:table-row table:style-name="表格37.1">
          <table:table-cell table:style-name="表格37.A1" office:value-type="string">
            <text:p text:style-name="P2"/>
          </table:table-cell>
        </table:table-row>
        <table:table-row table:style-name="表格37.1">
          <table:table-cell table:style-name="表格37.A1" office:value-type="string">
            <text:p text:style-name="P2" loext:marker-style-name="T40"><text:span text:style-name="T51"><text:s text:c="2"/>操作 <text:s text:c="14"/>Interval Heap <text:s text:c="3"/>普通 Max Heap <text:s text:c="3"/>普通 Min Heap</text:span><text:span text:style-name="T40"/></text:p>
          </table:table-cell>
        </table:table-row>
        <table:table-row table:style-name="表格37.1">
          <table:table-cell table:style-name="表格37.A1" office:value-type="string">
            <text:p text:style-name="P2" loext:marker-style-name="T40"><text:span text:style-name="T51"><text:s text:c="2"/>Find-Min（找最小） O(1) <text:s/>★ <text:s text:c="9"/>O(n) <text:s text:c="12"/>O(1)</text:span><text:span text:style-name="T40"/></text:p>
          </table:table-cell>
        </table:table-row>
        <table:table-row table:style-name="表格37.1">
          <table:table-cell table:style-name="表格37.A1" office:value-type="string">
            <text:p text:style-name="P2" loext:marker-style-name="T40"><text:span text:style-name="T51"><text:s text:c="2"/>Find-Max（找最大） O(1) <text:s/>★ <text:s text:c="9"/>O(1) <text:s text:c="12"/>O(n)</text:span><text:span text:style-name="T40"/></text:p>
          </table:table-cell>
        </table:table-row>
        <table:table-row table:style-name="表格37.1">
          <table:table-cell table:style-name="表格37.A1" office:value-type="string">
            <text:p text:style-name="P11"><text:span text:style-name="T212"><text:s text:c="2"/>Extract-Min <text:s text:c="7"/>O(log n) <text:s text:c="9"/></text:span><text:span text:style-name="T209">O(n) </text:span><text:span text:style-name="T212"><text:s text:c="12"/>O(log n)</text:span></text:p>
          </table:table-cell>
        </table:table-row>
        <table:table-row table:style-name="表格37.1">
          <table:table-cell table:style-name="表格37.A1" office:value-type="string">
            <text:p text:style-name="P11"><text:span text:style-name="T212"><text:s text:c="2"/>Extract-Max <text:s text:c="7"/>O(log n) <text:s text:c="9"/>O(log n) <text:s text:c="8"/></text:span><text:span text:style-name="T210">O(n)</text:span></text:p>
          </table:table-cell>
        </table:table-row>
        <table:table-row table:style-name="表格37.1">
          <table:table-cell table:style-name="表格37.A1" office:value-type="string">
            <text:p text:style-name="P2"/>
          </table:table-cell>
        </table:table-row>
        <table:table-row table:style-name="表格37.1">
          <table:table-cell table:style-name="表格37.A1" office:value-type="string">
            <text:p text:style-name="P2" loext:marker-style-name="T40"><text:span text:style-name="T91">Interval Heap 的兩個 Extract 都是 O(log n)</text:span><text:span text:style-name="T51">，這是其核心優勢：</text:span></text:p>
          </table:table-cell>
        </table:table-row>
        <table:table-row table:style-name="表格37.1">
          <table:table-cell table:style-name="表格37.A1" office:value-type="string">
            <text:p text:style-name="P2" loext:marker-style-name="T40"><text:span text:style-name="T51">Find 快是因為答案就在 Root；</text:span><text:span text:style-name="T40"/></text:p>
          </table:table-cell>
        </table:table-row>
        <table:table-row table:style-name="表格37.1">
          <table:table-cell table:style-name="表格37.A1" office:value-type="string">
            <text:p text:style-name="P2" loext:marker-style-name="T40"><text:span text:style-name="T171">Extract 要 O(log n) </text:span><text:span text:style-name="T51">是因為</text:span><text:span text:style-name="T168">刪除後必須 Heapify Down 修復結構</text:span><text:span text:style-name="T51">。</text:span></text:p>
          </table:table-cell>
        </table:table-row>
      </table:table>
      <text:p text:style-name="P8"/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2" loext:marker-style-name="T40"><text:span text:style-name="T51">⚠️ <text:s/>常見混淆整理：</text:span><text:span text:style-name="T40"/></text:p>
          </table:table-cell>
        </table:table-row>
        <table:table-row table:style-name="表格38.1">
          <table:table-cell table:style-name="表格38.A1" office:value-type="string">
            <text:p text:style-name="P2"/>
          </table:table-cell>
        </table:table-row>
        <table:table-row table:style-name="表格38.1">
          <table:table-cell table:style-name="表格38.A1" office:value-type="string">
            <text:p text:style-name="P2" loext:marker-style-name="T40"><text:span text:style-name="T51">「Root 節點同時持有全域最小與最大值，所以 O(1) 找到。」</text:span><text:span text:style-name="T40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40"><text:span text:style-name="T51">→ 正確。Find = 讀一個值，完全不修改樹，當然 O(1)。</text:span><text:span text:style-name="T40"/></text:p>
          </table:table-cell>
        </table:table-row>
        <table:table-row table:style-name="表格38.1">
          <table:table-cell table:style-name="表格38.A1" office:value-type="string">
            <text:p text:style-name="P2"/>
          </table:table-cell>
        </table:table-row>
        <table:table-row table:style-name="表格38.1">
          <table:table-cell table:style-name="表格38.A1" office:value-type="string">
            <text:p text:style-name="P2" loext:marker-style-name="T40"><text:span text:style-name="T51">「Find 都 O(1) 了，Extract 怎麼還要 O(log n)？」</text:span><text:span text:style-name="T40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40"><text:span text:style-name="T51">→ 因為</text:span><text:span text:style-name="T142"> Extract 是「刪除 + 修復整棵樹」，不只是讀值。</text:span></text:p>
          </table:table-cell>
        </table:table-row>
        <table:table-row table:style-name="表格38.1">
          <table:table-cell table:style-name="表格38.A1" office:value-type="string">
            <text:p text:style-name="P2" loext:marker-style-name="T40"><text:span text:style-name="T51"><text:s text:c="2"/>刪除後最後元素補位，再 Heapify Down 重建性質，</text:span><text:span text:style-name="T40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40"><text:span text:style-name="T51"><text:s text:c="2"/>最壞走 log n 層 → O(log n)。</text:span><text:span text:style-name="T40"/></text:p>
          </table:table-cell>
        </table:table-row>
        <table:table-row table:style-name="表格38.1">
          <table:table-cell table:style-name="表格38.A1" office:value-type="string">
            <text:p text:style-name="P2"/>
          </table:table-cell>
        </table:table-row>
        <table:table-row table:style-name="表格38.1">
          <table:table-cell table:style-name="表格38.A1" office:value-type="string">
            <text:p text:style-name="P2" loext:marker-style-name="T40"><text:span text:style-name="T51">記法：Find = 看，不動樹 → O(1)。</text:span><text:span text:style-name="T156">Extract = 拿走，要整理 → O(log n)</text:span><text:span text:style-name="T51">。</text:span></text:p>
          </table:table-cell>
        </table:table-row>
      </table:table>
      <text:p text:style-name="P8"><text:soft-page-break/></text:p>
      <text:p text:style-name="P8"/>
      <text:h text:style-name="P4" text:outline-level="2" loext:marker-style-name="T20"><text:span text:style-name="T20">7-5 <text:s/></text:span><text:span text:style-name="T21">操作複雜度一覽</text:span>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row table:style-name="表格39.1">
          <table:table-cell table:style-name="表格39.A1" office:value-type="string">
            <text:p text:style-name="Standard" loext:marker-style-name="T213"><text:span text:style-name="T214">操作</text:span><text:span text:style-name="T213"/></text:p>
          </table:table-cell>
          <table:table-cell table:style-name="表格39.A1" office:value-type="string">
            <text:p text:style-name="Standard" loext:marker-style-name="T213"><text:span text:style-name="T213">Interval Heap</text:span><text:span text:style-name="T213"/></text:p>
          </table:table-cell>
          <table:table-cell table:style-name="表格39.A1" office:value-type="string">
            <text:p text:style-name="Standard" loext:marker-style-name="T213"><text:span text:style-name="T214">普通 </text:span><text:span text:style-name="T213">Max Heap</text:span></text:p>
          </table:table-cell>
          <table:table-cell table:style-name="表格39.A1" office:value-type="string">
            <text:p text:style-name="Standard" loext:marker-style-name="T213"><text:span text:style-name="T214">普通 </text:span><text:span text:style-name="T213">Min Heap</text:span></text:p>
          </table:table-cell>
        </table:table-row>
        <table:table-row table:style-name="表格39.1">
          <table:table-cell table:style-name="表格39.A2" office:value-type="string">
            <text:p text:style-name="Standard" loext:marker-style-name="T194"><text:span text:style-name="T194">Find-Min</text:span><text:span text:style-name="T195">（找最小值）</text:span></text:p>
          </table:table-cell>
          <table:table-cell table:style-name="表格39.A2" office:value-type="string">
            <text:p text:style-name="Standard" loext:marker-style-name="T194"><text:span text:style-name="T194">O(1) ★</text:span><text:span text:style-name="T194"/></text:p>
          </table:table-cell>
          <table:table-cell table:style-name="表格39.A2" office:value-type="string">
            <text:p text:style-name="Standard" loext:marker-style-name="T194"><text:span text:style-name="T194">O(n)</text:span><text:span text:style-name="T194"/></text:p>
          </table:table-cell>
          <table:table-cell table:style-name="表格39.A2" office:value-type="string">
            <text:p text:style-name="Standard" loext:marker-style-name="T194"><text:span text:style-name="T194">O(1)</text:span><text:span text:style-name="T194"/></text:p>
          </table:table-cell>
        </table:table-row>
        <table:table-row table:style-name="表格39.1">
          <table:table-cell table:style-name="表格39.A3" office:value-type="string">
            <text:p text:style-name="Standard" loext:marker-style-name="T194"><text:span text:style-name="T194">Find-Max</text:span><text:span text:style-name="T195">（找最大值）</text:span></text:p>
          </table:table-cell>
          <table:table-cell table:style-name="表格39.A3" office:value-type="string">
            <text:p text:style-name="Standard" loext:marker-style-name="T194"><text:span text:style-name="T194">O(1) ★</text:span><text:span text:style-name="T194"/></text:p>
          </table:table-cell>
          <table:table-cell table:style-name="表格39.A3" office:value-type="string">
            <text:p text:style-name="Standard" loext:marker-style-name="T194"><text:span text:style-name="T194">O(1)</text:span><text:span text:style-name="T194"/></text:p>
          </table:table-cell>
          <table:table-cell table:style-name="表格39.A3" office:value-type="string">
            <text:p text:style-name="Standard" loext:marker-style-name="T194"><text:span text:style-name="T194">O(n)</text:span><text:span text:style-name="T194"/></text:p>
          </table:table-cell>
        </table:table-row>
        <table:table-row table:style-name="表格39.1">
          <table:table-cell table:style-name="表格39.A2" office:value-type="string">
            <text:p text:style-name="Standard" loext:marker-style-name="T194"><text:span text:style-name="T194">Extract-Min</text:span><text:span text:style-name="T195">（取出最小）</text:span></text:p>
          </table:table-cell>
          <table:table-cell table:style-name="表格39.A2" office:value-type="string">
            <text:p text:style-name="Standard" loext:marker-style-name="T194"><text:span text:style-name="T194">O(log n) ★</text:span><text:span text:style-name="T194"/></text:p>
          </table:table-cell>
          <table:table-cell table:style-name="表格39.A2" office:value-type="string">
            <text:p text:style-name="Standard" loext:marker-style-name="T194"><text:span text:style-name="T194">O(n)</text:span><text:span text:style-name="T194"/></text:p>
          </table:table-cell>
          <table:table-cell table:style-name="表格39.A2" office:value-type="string">
            <text:p text:style-name="Standard" loext:marker-style-name="T194"><text:span text:style-name="T194">O(log n)</text:span><text:span text:style-name="T194"/></text:p>
          </table:table-cell>
        </table:table-row>
        <table:table-row table:style-name="表格39.1">
          <table:table-cell table:style-name="表格39.A3" office:value-type="string">
            <text:p text:style-name="Standard" loext:marker-style-name="T194"><text:span text:style-name="T194">Extract-Max</text:span><text:span text:style-name="T195">（取出最大）</text:span></text:p>
          </table:table-cell>
          <table:table-cell table:style-name="表格39.A3" office:value-type="string">
            <text:p text:style-name="Standard" loext:marker-style-name="T194"><text:span text:style-name="T194">O(log n) ★</text:span><text:span text:style-name="T194"/></text:p>
          </table:table-cell>
          <table:table-cell table:style-name="表格39.A3" office:value-type="string">
            <text:p text:style-name="Standard" loext:marker-style-name="T194"><text:span text:style-name="T194">O(log n)</text:span><text:span text:style-name="T194"/></text:p>
          </table:table-cell>
          <table:table-cell table:style-name="表格39.A3" office:value-type="string">
            <text:p text:style-name="Standard" loext:marker-style-name="T194"><text:span text:style-name="T194">O(n)</text:span><text:span text:style-name="T194"/></text:p>
          </table:table-cell>
        </table:table-row>
      </table:table>
      <text:p text:style-name="P5"/>
      <table:table table:name="表格40" table:style-name="表格40">
        <table:table-column table:style-name="表格40.A"/>
        <table:table-row table:style-name="表格40.1">
          <table:table-cell table:style-name="表格40.A1" office:value-type="string">
            <text:p text:style-name="P7" loext:marker-style-name="T182"><text:span text:style-name="T182">⚠️ <text:s/></text:span><text:span text:style-name="T183">普通 </text:span><text:span text:style-name="T182">Min/Max Heap </text:span><text:span text:style-name="T183">各有盲點：</text:span></text:p>
            <text:p text:style-name="P7" loext:marker-style-name="T191"><text:span text:style-name="T72">普通 </text:span><text:span text:style-name="T73">Max Heap </text:span><text:span text:style-name="T72">找最小值 </text:span><text:span text:style-name="T192">→ </text:span><text:span text:style-name="T185">O(n)</text:span><text:span text:style-name="T184">（要掃整棵樹）</text:span></text:p>
            <text:p text:style-name="P7" loext:marker-style-name="T191"><text:span text:style-name="T83">普通 </text:span><text:span text:style-name="T84">Min Heap </text:span><text:span text:style-name="T83">找最大值 </text:span><text:span text:style-name="T192">→ </text:span><text:span text:style-name="T185">O(n)</text:span><text:span text:style-name="T184">（同理）</text:span></text:p>
            <text:p text:style-name="P41" loext:marker-style-name="T191"><text:span text:style-name="T90">Interval Heap </text:span><text:span text:style-name="T89">解決此問題，兩端操作都達到 </text:span><text:span text:style-name="T90">O(log n)</text:span><text:span text:style-name="T192">，這是其最大優勢。</text:span></text:p>
          </table:table-cell>
        </table:table-row>
      </table:table>
      <text:p text:style-name="P8"/>
      <text:h text:style-name="P4" text:outline-level="2" loext:marker-style-name="T20"><text:span text:style-name="T20">7-6 <text:s/>Insert </text:span><text:span text:style-name="T21">操作示範（插入 </text:span><text:span text:style-name="T20">5</text:span><text:span text:style-name="T21">）</text:span></text:h>
      <text:p text:style-name="P5" loext:marker-style-name="T180"><text:span text:style-name="T181">以下示範將數字 </text:span><text:span text:style-name="T180">5 </text:span><text:span text:style-name="T181">插入含 </text:span><text:span text:style-name="T180">{10, 100}, {20, 80}, {30, 90} </text:span><text:span text:style-name="T181">的 </text:span><text:span text:style-name="T180">Interval Heap</text:span><text:span text:style-name="T181">：</text:span></text:p>
      <text:p text:style-name="P37" loext:marker-style-name="T196"><text:span text:style-name="T196">初始： <text:s text:c="10"/>[10, 100]</text:span><text:span text:style-name="T196"/></text:p>
      <text:p text:style-name="P6" loext:marker-style-name="T196"><text:span text:style-name="T196"><text:s text:c="18"/>/ <text:s text:c="7"/>\</text:span><text:span text:style-name="T196"/></text:p>
      <text:p text:style-name="P6" loext:marker-style-name="T196"><text:span text:style-name="T196"><text:s text:c="13"/>[20, 80] <text:s text:c="2"/>[30, 90]</text:span><text:span text:style-name="T196"/></text:p>
      <text:p text:style-name="P6"/>
      <text:p text:style-name="P6" loext:marker-style-name="T196"><text:span text:style-name="T196">Step 1：</text:span><text:span text:style-name="T197">新葉 [5, 5] </text:span><text:span text:style-name="T196">接在 [20, 80] 左子位置</text:span></text:p>
      <text:p text:style-name="P6" loext:marker-style-name="T196"><text:span text:style-name="T196"><text:s text:c="13"/>[10, 100]</text:span><text:span text:style-name="T196"/></text:p>
      <text:p text:style-name="P6" loext:marker-style-name="T196"><text:span text:style-name="T196"><text:s text:c="14"/>/ <text:s text:c="7"/>\</text:span><text:span text:style-name="T196"/></text:p>
      <text:p text:style-name="P6" loext:marker-style-name="T196"><text:span text:style-name="T196"><text:s text:c="9"/>[20, 80] <text:s text:c="2"/>[30, 90]</text:span><text:span text:style-name="T196"/></text:p>
      <text:p text:style-name="P6" loext:marker-style-name="T196"><text:span text:style-name="T196"><text:s text:c="14"/>/</text:span><text:span text:style-name="T196"/></text:p>
      <text:p text:style-name="P6" loext:marker-style-name="T196"><text:span text:style-name="T196"><text:s text:c="11"/>[5, 5] <text:s text:c="2"/>← </text:span><text:span text:style-name="T81">5 &lt; parent.min(20)</text:span><text:span text:style-name="T196">，</text:span><text:span text:style-name="T161">min 端需上浮</text:span></text:p>
      <text:p text:style-name="P6"/>
      <text:p text:style-name="P6" loext:marker-style-name="T196"><text:span text:style-name="T196">Step 2：</text:span><text:span text:style-name="T133">交換 min 端 → [20,80]→[5,80]</text:span><text:span text:style-name="T196">，</text:span><text:span text:style-name="T161">葉→[20,20]</text:span></text:p>
      <text:p text:style-name="P6" loext:marker-style-name="T196"><text:span text:style-name="T196"><text:s text:c="13"/>[10, 100]</text:span><text:span text:style-name="T196"/></text:p>
      <text:p text:style-name="P6" loext:marker-style-name="T196"><text:span text:style-name="T196"><text:s text:c="14"/>/ <text:s text:c="7"/>\</text:span><text:span text:style-name="T196"/></text:p>
      <text:p text:style-name="P6" loext:marker-style-name="T196"><text:span text:style-name="T196"><text:s text:c="10"/>[5, 80] <text:s text:c="2"/>[30, 90] <text:s text:c="2"/>← </text:span><text:span text:style-name="T81">5 &lt; Root.min(10)</text:span><text:span text:style-name="T196">，</text:span><text:span text:style-name="T161">繼續上浮</text:span></text:p>
      <text:p text:style-name="P6" loext:marker-style-name="T196"><text:span text:style-name="T196"><text:s text:c="14"/>/</text:span><text:span text:style-name="T196"/></text:p>
      <text:p text:style-name="P6" loext:marker-style-name="T196"><text:span text:style-name="T196"><text:s text:c="10"/>[20, 20]</text:span><text:span text:style-name="T196"/></text:p>
      <text:p text:style-name="P6"/>
      <text:p text:style-name="P6" loext:marker-style-name="T196"><text:span text:style-name="T196">Step 3：</text:span><text:span text:style-name="T133">交換 min 端 → Root[10,100]→[5,100]</text:span><text:span text:style-name="T196">，</text:span><text:span text:style-name="T161">[5,80]→[10,80]</text:span></text:p>
      <text:p text:style-name="P6"/>
      <text:p text:style-name="P6" loext:marker-style-name="T196"><text:span text:style-name="T196">最終： <text:s text:c="10"/>[5, 100] <text:s text:c="2"/>← </text:span><text:span text:style-name="T140">全域最小值已更新</text:span></text:p>
      <text:p text:style-name="P6" loext:marker-style-name="T196"><text:span text:style-name="T196"><text:s text:c="18"/>/ <text:s text:c="7"/>\</text:span><text:span text:style-name="T196"/></text:p>
      <text:p text:style-name="P6" loext:marker-style-name="T196"><text:span text:style-name="T196"><text:s text:c="13"/>[10, 80] <text:s text:c="2"/>[30, 90]</text:span><text:span text:style-name="T196"/></text:p>
      <text:p text:style-name="P6" loext:marker-style-name="T196"><text:span text:style-name="T196"><text:s text:c="18"/>/</text:span><text:span text:style-name="T196"/></text:p>
      <text:p text:style-name="P39" loext:marker-style-name="T196"><text:soft-page-break/><text:span text:style-name="T196"><text:s text:c="13"/>[20, 20]</text:span><text:span text:style-name="T196"/></text:p>
      <text:p text:style-name="P7"/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7" loext:marker-style-name="T182"><text:span text:style-name="T182">Insert </text:span><text:span text:style-name="T183">規則：</text:span></text:p>
            <text:p text:style-name="P7" loext:marker-style-name="T191"><text:span text:style-name="T192">新值 </text:span><text:span text:style-name="T191">&lt; </text:span><text:span text:style-name="T192">父節點左值（</text:span><text:span text:style-name="T191">min</text:span><text:span text:style-name="T192">）→ 交換左值，繼續往上（</text:span><text:span text:style-name="T191">min </text:span><text:span text:style-name="T192">端上浮）</text:span></text:p>
            <text:p text:style-name="P7" loext:marker-style-name="T191"><text:span text:style-name="T192">新值 </text:span><text:span text:style-name="T191">&gt; </text:span><text:span text:style-name="T192">父節點右值（</text:span><text:span text:style-name="T191">max</text:span><text:span text:style-name="T192">）→ 交換右值，繼續往上（</text:span><text:span text:style-name="T191">max </text:span><text:span text:style-name="T192">端上浮）</text:span></text:p>
            <text:p text:style-name="P41" loext:marker-style-name="T191"><text:span text:style-name="T192">新值介於父節點 </text:span><text:span text:style-name="T191">[min, max] </text:span><text:span text:style-name="T192">之間 → 合法，停止</text:span></text:p>
          </table:table-cell>
        </table:table-row>
      </table:table>
      <text:h text:style-name="P3" text:outline-level="1"><text:span text:style-name="T177">八、合併兩個 </text:span><text:span text:style-name="T176">Heap</text:span><text:span text:style-name="T177">（</text:span><text:span text:style-name="T176">Merge Heap</text:span><text:span text:style-name="T177">）【</text:span><text:span text:style-name="T176">111</text:span><text:span text:style-name="T177">地</text:span><text:span text:style-name="T176">Q4</text:span><text:span text:style-name="T177">】</text:span></text:h>
      <text:h text:style-name="P4" text:outline-level="2" loext:marker-style-name="T20"><text:span text:style-name="T20">8-1 <text:s/></text:span><text:span text:style-name="T21">問題起源：普通 </text:span><text:span text:style-name="T20">Heap </text:span><text:span text:style-name="T21">合併需要 </text:span><text:span text:style-name="T20">O(n+m)</text:span></text:h>
      <text:p text:style-name="P5" loext:marker-style-name="T180"><text:span text:style-name="T181">假設現在有兩個 </text:span><text:span text:style-name="T180">Max Heap A </text:span><text:span text:style-name="T181">和 </text:span><text:span text:style-name="T180">B</text:span><text:span text:style-name="T181">，你想把它們合併成一個新的 </text:span><text:span text:style-name="T180">Max Heap</text:span><text:span text:style-name="T181">：</text:span></text:p>
      <text:p text:style-name="P37" loext:marker-style-name="T196"><text:span text:style-name="T196"><text:s text:c="2"/>Heap A： <text:s text:c="9"/>Heap B： <text:s text:c="9"/>合併目標：</text:span><text:span text:style-name="T196"/></text:p>
      <text:p text:style-name="P6" loext:marker-style-name="T196"><text:span text:style-name="T196"><text:s text:c="7"/>90 <text:s text:c="15"/>95 <text:s text:c="16"/>95</text:span><text:span text:style-name="T196"/></text:p>
      <text:p text:style-name="P6" loext:marker-style-name="T196"><text:span text:style-name="T196"><text:s text:c="6"/>/ <text:s/>\ <text:s text:c="13"/>/ <text:s/>\ <text:s text:c="14"/>/ <text:s text:c="3"/>\</text:span><text:span text:style-name="T196"/></text:p>
      <text:p text:style-name="P6" loext:marker-style-name="T196"><text:span text:style-name="T196"><text:s text:c="5"/>70 <text:s text:c="2"/>80 <text:s text:c="10"/>60 <text:s text:c="2"/>50 <text:s text:c="10"/>90 <text:s text:c="5"/>80</text:span><text:span text:style-name="T196"/></text:p>
      <text:p text:style-name="P6" loext:marker-style-name="T196"><text:span text:style-name="T196"><text:s text:c="40"/>/ <text:s/>\ <text:s text:c="2"/>/</text:span><text:span text:style-name="T196"/></text:p>
      <text:p text:style-name="P39" loext:marker-style-name="T196"><text:span text:style-name="T196"><text:s text:c="39"/>70 <text:s/>60 50</text:span><text:span text:style-name="T196"/></text:p>
      <text:p text:style-name="P7"/>
      <text:p text:style-name="P5" loext:marker-style-name="T180"><text:span text:style-name="T181">普通 </text:span><text:span text:style-name="T180">Binary Heap </text:span><text:span text:style-name="T181">沒有高效的合併方法，通常只能：</text:span></text:p>
      <text:list text:continue-numbering="true" text:style-name="WWNum14">
        <text:list-item>
          <text:p text:style-name="P28" loext:marker-style-name="T180"><text:span text:style-name="T181">方法：把 </text:span><text:span text:style-name="T180">A </text:span><text:span text:style-name="T181">和 </text:span><text:span text:style-name="T180">B </text:span><text:span text:style-name="T181">的所有元素倒出來，重新執行 </text:span><text:span text:style-name="T180">Bottom-Up Build Heap</text:span><text:span text:style-name="T181">。</text:span></text:p>
        </text:list-item>
        <text:list-item>
          <text:p text:style-name="P28" loext:marker-style-name="T180"><text:span text:style-name="T181">代價：</text:span><text:span text:style-name="T180">O(n+m)</text:span><text:span text:style-name="T181">，</text:span><text:span text:style-name="T180">n </text:span><text:span text:style-name="T181">和 </text:span><text:span text:style-name="T180">m </text:span><text:span text:style-name="T181">是兩個 </text:span><text:span text:style-name="T180">Heap </text:span><text:span text:style-name="T181">的大小。</text:span></text:p>
        </text:list-item>
      </text:list>
      <text:p text:style-name="P7"/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7" loext:marker-style-name="T182"><text:span text:style-name="T182">❓ O(n+m) </text:span><text:span text:style-name="T183">有什麼問題？</text:span></text:p>
            <text:p text:style-name="P7" loext:marker-style-name="T191"><text:span text:style-name="T192">對單次合併來說 </text:span><text:span text:style-name="T191">O(n+m) </text:span><text:span text:style-name="T192">尚可接受，但有些系統一天要合併幾十萬次：</text:span></text:p>
            <text:p text:style-name="P7" loext:marker-style-name="T191"><text:span text:style-name="T191"><text:s text:c="2"/>• Event-driven Simulation</text:span><text:span text:style-name="T192">（事件驅動模擬）</text:span></text:p>
            <text:p text:style-name="P7" loext:marker-style-name="T191"><text:span text:style-name="T191"><text:s text:c="2"/>• </text:span><text:span text:style-name="T192">作業系統排程器（</text:span><text:span text:style-name="T191">Scheduler</text:span><text:span text:style-name="T192">）</text:span></text:p>
            <text:p text:style-name="P41" loext:marker-style-name="T191"><text:span text:style-name="T191"><text:s text:c="2"/>• </text:span><text:span text:style-name="T192">分散式工作佇列（</text:span><text:span text:style-name="T191">Distributed Job Queue</text:span><text:span text:style-name="T192">）</text:span></text:p>
          </table:table-cell>
        </table:table-row>
      </table:table>
      <text:p text:style-name="P8"/>
      <text:h text:style-name="P4" text:outline-level="2" loext:marker-style-name="T20"><text:span text:style-name="T20">8-2 <text:s/></text:span><text:span text:style-name="T21">解決方案：把右側路徑弄得很短</text:span></text:h>
      <text:p text:style-name="P5" loext:marker-style-name="T180"><text:span text:style-name="T181">發明者的想法很直接：</text:span><text:span text:style-name="T180"/></text:p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7" loext:marker-style-name="T182"><text:span text:style-name="T182">Merge </text:span><text:span text:style-name="T183">只沿右側路徑（</text:span><text:span text:style-name="T182">right path</text:span><text:span text:style-name="T183">）遞迴進行。</text:span></text:p>
            <text:p text:style-name="P7" loext:marker-style-name="T191"><text:span text:style-name="T192">如果右側路徑很短 → </text:span><text:span text:style-name="T191">Merge </text:span><text:span text:style-name="T192">就很快。</text:span></text:p>
            <text:p text:style-name="P41" loext:marker-style-name="T191"><text:span text:style-name="T192">因此：故意把樹弄歪，讓右側路徑保持極短。</text:span><text:span text:style-name="T191"/></text:p>
          </table:table-cell>
        </table:table-row>
      </table:table>
      <text:p text:style-name="P7"/>
      <text:p text:style-name="P37" loext:marker-style-name="T196"><text:span text:style-name="T196"><text:s text:c="2"/>普通 Heap（平衡）： <text:s text:c="11"/>Leftist Heap（故意偏左）：</text:span><text:span text:style-name="T196"/></text:p>
      <text:p text:style-name="P6" loext:marker-style-name="T196"><text:soft-page-break/><text:span text:style-name="T196"><text:s text:c="8"/>90 <text:s text:c="29"/>90</text:span><text:span text:style-name="T196"/></text:p>
      <text:p text:style-name="P6" loext:marker-style-name="T196"><text:span text:style-name="T196"><text:s text:c="7"/>/ <text:s/>\ <text:s text:c="27"/>/</text:span><text:span text:style-name="T196"/></text:p>
      <text:p text:style-name="P6" loext:marker-style-name="T196"><text:span text:style-name="T196"><text:s text:c="6"/>80 <text:s text:c="2"/>70 <text:s text:c="24"/>80</text:span><text:span text:style-name="T196"/></text:p>
      <text:p text:style-name="P6" loext:marker-style-name="T196"><text:span text:style-name="T196"><text:s text:c="5"/>/ \ / \ <text:s text:c="24"/>/</text:span><text:span text:style-name="T196"/></text:p>
      <text:p text:style-name="P6" loext:marker-style-name="T196"><text:span text:style-name="T196"><text:s text:c="4"/>60 50 40 30 <text:s text:c="21"/>70</text:span><text:span text:style-name="T196"/></text:p>
      <text:p text:style-name="P6" loext:marker-style-name="T196"><text:span text:style-name="T196"><text:s text:c="36"/>/</text:span><text:span text:style-name="T196"/></text:p>
      <text:p text:style-name="P6" loext:marker-style-name="T196"><text:span text:style-name="T196"><text:s text:c="35"/>60</text:span><text:span text:style-name="T196"/></text:p>
      <text:p text:style-name="P6"/>
      <text:p text:style-name="P39" loext:marker-style-name="T196"><text:span text:style-name="T196"><text:s text:c="2"/>左右差不多，Merge 要走很深 <text:s text:c="5"/>右側路徑只有 1 步！Merge 超快</text:span><text:span text:style-name="T196"/></text:p>
      <text:p text:style-name="P8"/>
      <text:h text:style-name="P4" text:outline-level="2"><text:span text:style-name="T20">8-3 <text:s/>NPL</text:span><text:span text:style-name="T21">（</text:span><text:span text:style-name="T20">Null Path Length</text:span><text:span text:style-name="T21">，空路徑長度）</text:span></text:h>
      <text:p text:style-name="P5" loext:marker-style-name="T180"><text:span text:style-name="T180">NPL </text:span><text:span text:style-name="T181">是「量化右側有多短」的工具。直觀理解：</text:span></text:p>
      <table:table table:name="表格44" table:style-name="表格44">
        <table:table-column table:style-name="表格44.A"/>
        <table:table-row table:style-name="表格44.1">
          <table:table-cell table:style-name="表格44.A1" office:value-type="string">
            <text:p text:style-name="P7" loext:marker-style-name="T182"><text:span text:style-name="T182">NPL(node) = </text:span><text:span text:style-name="T183">從該節點出發，走到最近的空節點（</text:span><text:span text:style-name="T182">null</text:span><text:span text:style-name="T183">）所需的步數</text:span></text:p>
            <text:p text:style-name="P41" loext:marker-style-name="T191"><text:span text:style-name="T191">NPL(null) = -1 <text:s/></text:span><text:span text:style-name="T192">（空節點本身的定義）</text:span></text:p>
          </table:table-cell>
        </table:table-row>
      </table:table>
      <text:p text:style-name="P7"/>
      <text:p text:style-name="P5" loext:marker-style-name="T180"><text:span text:style-name="T181">公式：</text:span><text:span text:style-name="T180">NPL(node) = 1 + min( NPL(</text:span><text:span text:style-name="T181">左子</text:span><text:span text:style-name="T180">), NPL(</text:span><text:span text:style-name="T181">右子</text:span><text:span text:style-name="T180">) )</text:span></text:p>
      <text:p text:style-name="P7"/>
      <text:p text:style-name="P42" loext:marker-style-name="T178"><text:span text:style-name="T178">NPL </text:span><text:span text:style-name="T179">計算範例</text:span></text:p>
      <text:p text:style-name="P37" loext:marker-style-name="T196"><text:span text:style-name="T196"><text:s text:c="14"/>3 <text:s text:c="11"/>← 算 NPL</text:span><text:span text:style-name="T196"/></text:p>
      <text:p text:style-name="P6" loext:marker-style-name="T196"><text:span text:style-name="T196"><text:s text:c="13"/>/ \</text:span><text:span text:style-name="T196"/></text:p>
      <text:p text:style-name="P6" loext:marker-style-name="T196"><text:span text:style-name="T196"><text:s text:c="12"/>5 <text:s text:c="2"/>8</text:span><text:span text:style-name="T196"/></text:p>
      <text:p text:style-name="P6" loext:marker-style-name="T196"><text:span text:style-name="T196"><text:s text:c="11"/>/ \</text:span><text:span text:style-name="T196"/></text:p>
      <text:p text:style-name="P6" loext:marker-style-name="T196"><text:span text:style-name="T196"><text:s text:c="10"/>9 <text:s text:c="2"/>7</text:span><text:span text:style-name="T196"/></text:p>
      <text:p text:style-name="P6"/>
      <text:p text:style-name="P6" loext:marker-style-name="T196"><text:span text:style-name="T196"><text:s text:c="2"/>計算（由葉往根）：</text:span><text:span text:style-name="T196"/></text:p>
      <text:p text:style-name="P6" loext:marker-style-name="T196"><text:span text:style-name="T196"><text:s text:c="4"/>NPL(9) = 1 + min(-1,-1) = 0 <text:s text:c="2"/>（葉節點，兩側皆空）</text:span><text:span text:style-name="T196"/></text:p>
      <text:p text:style-name="P6" loext:marker-style-name="T196"><text:span text:style-name="T196"><text:s text:c="4"/>NPL(7) = 0 <text:s text:c="20"/>（同上）</text:span><text:span text:style-name="T196"/></text:p>
      <text:p text:style-name="P6" loext:marker-style-name="T196"><text:span text:style-name="T196"><text:s text:c="4"/>NPL(8) = 0 <text:s text:c="20"/>（葉節點）</text:span><text:span text:style-name="T196"/></text:p>
      <text:p text:style-name="P6" loext:marker-style-name="T196"><text:span text:style-name="T196"><text:s text:c="4"/>NPL(5) = 1 + min(NPL(9),NPL(7)) = 1+min(0,0) = 1</text:span><text:span text:style-name="T196"/></text:p>
      <text:p text:style-name="P39" loext:marker-style-name="T196"><text:span text:style-name="T196"><text:s text:c="4"/>NPL(3) = 1 + min(NPL(5),NPL(8)) = 1+min(1,0) = 1</text:span><text:span text:style-name="T196"/></text:p>
      <text:p text:style-name="P8"/>
      <text:h text:style-name="P4" text:outline-level="2" loext:marker-style-name="T20"><text:span text:style-name="T20">8-4 <text:s/></text:span><text:span text:style-name="T21">左偏性質（</text:span><text:span text:style-name="T20">Leftist Property</text:span><text:span text:style-name="T21">）</text:span></text:h>
      <text:p text:style-name="P5" loext:marker-style-name="T180"><text:span text:style-name="T180">Leftist Heap </text:span><text:span text:style-name="T181">對每個節點加一條規定：</text:span>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7" loext:marker-style-name="T182"><text:span text:style-name="T183">每個節點：</text:span><text:span text:style-name="T182">NPL</text:span><text:span text:style-name="T183">（左子樹）≥ </text:span><text:span text:style-name="T182">NPL</text:span><text:span text:style-name="T183">（右子樹）</text:span></text:p>
            <text:p text:style-name="P41" loext:marker-style-name="T191"><text:span text:style-name="T192">意思：左邊一定比右邊「深」或「一樣深」→ 右側路徑一定是最短路徑。</text:span><text:span text:style-name="T191"/></text:p>
          </table:table-cell>
        </table:table-row>
      </table:table>
      <text:p text:style-name="P7"/>
      <text:p text:style-name="P5" loext:marker-style-name="T180"><text:span text:style-name="T181">這個規定保證了：</text:span><text:span text:style-name="T180"/></text:p>
      <text:list text:continue-numbering="true" text:style-name="WWNum14">
        <text:list-item>
          <text:p text:style-name="P28" loext:marker-style-name="T180"><text:span text:style-name="T181">右側路徑長度 ≤ </text:span><text:span text:style-name="T180">log(n+1) <text:s/></text:span><text:span text:style-name="T181">（即使整棵樹有 </text:span><text:span text:style-name="T180">n </text:span><text:span text:style-name="T181">個節點，右路徑也不超過 </text:span><text:span text:style-name="T180">log n </text:span><text:span text:style-name="T181">步）</text:span></text:p>
        </text:list-item>
        <text:list-item>
          <text:p text:style-name="P28" loext:marker-style-name="T180"><text:span text:style-name="T180">Merge </text:span><text:span text:style-name="T181">沿右路徑進行 → 深度 ≤ </text:span><text:span text:style-name="T180">log n → </text:span><text:span text:style-name="T181">時間 </text:span><text:span text:style-name="T180">O(log n)</text:span></text:p>
        </text:list-item>
      </text:list>
      <text:p text:style-name="P7"/>
      <text:p text:style-name="P42" loext:marker-style-name="T178"><text:soft-page-break/><text:span text:style-name="T179">上面範例的左偏驗證</text:span><text:span text:style-name="T178"/></text:p>
      <text:p text:style-name="P37" loext:marker-style-name="T196"><text:span text:style-name="T196"><text:s text:c="2"/>節點 3：NPL(左=5) = 1 <text:s/>≥ <text:s/>NPL(右=8) = 0 <text:s text:c="2"/>✓ 左偏</text:span><text:span text:style-name="T196"/></text:p>
      <text:p text:style-name="P6" loext:marker-style-name="T196"><text:span text:style-name="T196"><text:s text:c="2"/>節點 5：NPL(左=9) = 0 <text:s/>≥ <text:s/>NPL(右=7) = 0 <text:s text:c="2"/>✓ 左偏（相等也算）</text:span><text:span text:style-name="T196"/></text:p>
      <text:p text:style-name="P6"/>
      <text:p text:style-name="P39" loext:marker-style-name="T196"><text:span text:style-name="T196">→ 此樹是合法的 Min Leftist Heap ✓</text:span><text:span text:style-name="T196"/></text:p>
      <text:p text:style-name="P8"/>
      <text:h text:style-name="P4" text:outline-level="2"><text:span text:style-name="T20">8-5 <text:s/>Merge </text:span><text:span text:style-name="T21">演算法（以 </text:span><text:span text:style-name="T20">Min Leftist Heap </text:span><text:span text:style-name="T21">為例）</text:span></text:h>
      <text:p text:style-name="P5" loext:marker-style-name="T180"><text:span text:style-name="T181">只有四個步驟，每次都沿右側路徑遞迴：</text:span><text:span text:style-name="T180"/></text:p>
      <text:p text:style-name="P37" loext:marker-style-name="T196"><text:span text:style-name="T196"><text:s text:c="2"/>Step 1：比較 A 和 B 的 Root</text:span><text:span text:style-name="T196"/></text:p>
      <text:p text:style-name="P6" loext:marker-style-name="T196"><text:span text:style-name="T196"><text:s text:c="11"/>→ 較小的 Root 成為新 Root（Min Heap）</text:span><text:span text:style-name="T196"/></text:p>
      <text:p text:style-name="P6" loext:marker-style-name="T196"><text:span text:style-name="T196"><text:s text:c="11"/>→ 較大的 Root 成為另一個子樹（稱為 b）</text:span><text:span text:style-name="T196"/></text:p>
      <text:p text:style-name="P6"/>
      <text:p text:style-name="P6" loext:marker-style-name="T196"><text:span text:style-name="T196"><text:s text:c="2"/>Step 2：遞迴合併「新 Root 的右子樹」與「b」</text:span><text:span text:style-name="T196"/></text:p>
      <text:p text:style-name="P6" loext:marker-style-name="T196"><text:span text:style-name="T196"><text:s text:c="11"/>→ Merge(newRoot.right, b)</text:span><text:span text:style-name="T196"/></text:p>
      <text:p text:style-name="P6"/>
      <text:p text:style-name="P6" loext:marker-style-name="T196"><text:span text:style-name="T196"><text:s text:c="2"/>Step 3：合併完後，若 NPL(右子樹) &gt; NPL(左子樹)</text:span><text:span text:style-name="T196"/></text:p>
      <text:p text:style-name="P6" loext:marker-style-name="T196"><text:span text:style-name="T196"><text:s text:c="11"/>→ 交換左右子樹，恢復左偏性質</text:span><text:span text:style-name="T196"/></text:p>
      <text:p text:style-name="P6"/>
      <text:p text:style-name="P39" loext:marker-style-name="T196"><text:span text:style-name="T196"><text:s text:c="2"/>Step 4：更新 NPL 值</text:span><text:span text:style-name="T196"/></text:p>
      <text:p text:style-name="P7"/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7" loext:marker-style-name="T182"><text:span text:style-name="T183">為什麼只走右側路徑？</text:span><text:span text:style-name="T182"/></text:p>
            <text:p text:style-name="P7" loext:marker-style-name="T191"><text:span text:style-name="T191">Merge </text:span><text:span text:style-name="T192">每次遞迴都只取「右子樹」→ 路徑深度 </text:span><text:span text:style-name="T191">= </text:span><text:span text:style-name="T192">右側路徑長度 ≤ </text:span><text:span text:style-name="T191">log n</text:span><text:span text:style-name="T192">。</text:span></text:p>
            <text:p text:style-name="P41" loext:marker-style-name="T191"><text:span text:style-name="T192">左側路徑完全不碰，保持不變。</text:span><text:span text:style-name="T191"/></text:p>
          </table:table-cell>
        </table:table-row>
      </table:table>
      <text:p text:style-name="P8"/>
      <text:h text:style-name="P4" text:outline-level="2" loext:marker-style-name="T20"><text:span text:style-name="T20">8-6 <text:s/>Merge </text:span><text:span text:style-name="T21">完整範例</text:span></text:h>
      <text:p text:style-name="P37" loext:marker-style-name="T196"><text:span text:style-name="T196"><text:s text:c="2"/>Heap A（NPL=1）： <text:s text:c="5"/>Heap B（NPL=1）：</text:span><text:span text:style-name="T196"/></text:p>
      <text:p text:style-name="P6" loext:marker-style-name="T196"><text:span text:style-name="T196"><text:s text:c="10"/>3 <text:s text:c="21"/>6</text:span><text:span text:style-name="T196"/></text:p>
      <text:p text:style-name="P6" loext:marker-style-name="T196"><text:span text:style-name="T196"><text:s text:c="9"/>/ \ <text:s text:c="18"/>/ \</text:span><text:span text:style-name="T196"/></text:p>
      <text:p text:style-name="P6" loext:marker-style-name="T196"><text:span text:style-name="T196"><text:s text:c="8"/>5 <text:s text:c="2"/>8 <text:s text:c="15"/>12 <text:s text:c="2"/>7</text:span><text:span text:style-name="T196"/></text:p>
      <text:p text:style-name="P6"/>
      <text:p text:style-name="P6" loext:marker-style-name="T196"><text:span text:style-name="T196"><text:s text:c="2"/>Step 1：3 &lt; 6 → 3 為新 Root，遞迴 Merge(A.right=8, B=6)</text:span><text:span text:style-name="T196"/></text:p>
      <text:p text:style-name="P6"/>
      <text:p text:style-name="P6" loext:marker-style-name="T196"><text:span text:style-name="T196"><text:s text:c="2"/>Step 2：Merge(8, 6)：6 &lt; 8 → 6 為新 Root，遞迴 Merge(B.right=7, 8)</text:span><text:span text:style-name="T196"/></text:p>
      <text:p text:style-name="P6"/>
      <text:p text:style-name="P6" loext:marker-style-name="T196"><text:span text:style-name="T196"><text:s text:c="2"/>Step 3：Merge(7, 8)：7 &lt; 8 → 7 為新 Root</text:span><text:span text:style-name="T196"/></text:p>
      <text:p text:style-name="P6" loext:marker-style-name="T196"><text:span text:style-name="T196"><text:s text:c="11"/>Merge(null, 8) = 8 <text:s/>→ <text:s/>7.right = 8</text:span><text:span text:style-name="T196"/></text:p>
      <text:p text:style-name="P6" loext:marker-style-name="T196"><text:span text:style-name="T196"><text:s text:c="11"/>NPL(7.left=null)=-1 &lt; NPL(7.right=8)=0 <text:s/>→ <text:s/>交換左右！</text:span><text:span text:style-name="T196"/></text:p>
      <text:p text:style-name="P6" loext:marker-style-name="T196"><text:span text:style-name="T196"><text:s text:c="11"/>結果：7.left=8, 7.right=null, NPL(7)=0</text:span><text:span text:style-name="T196"/></text:p>
      <text:p text:style-name="P6" loext:marker-style-name="T196"><text:span text:style-name="T196"><text:s text:c="20"/>7</text:span><text:span text:style-name="T196"/></text:p>
      <text:p text:style-name="P6" loext:marker-style-name="T196"><text:span text:style-name="T196"><text:s text:c="19"/>/</text:span><text:span text:style-name="T196"/></text:p>
      <text:p text:style-name="P6" loext:marker-style-name="T196"><text:span text:style-name="T196"><text:s text:c="18"/>8</text:span><text:span text:style-name="T196"/></text:p>
      <text:p text:style-name="P6"/>
      <text:p text:style-name="P6" loext:marker-style-name="T196"><text:span text:style-name="T196"><text:s text:c="2"/>Step 4：回填 Merge(8,6)：6.left=12, 6.right=7</text:span><text:span text:style-name="T196"/></text:p>
      <text:p text:style-name="P6" loext:marker-style-name="T196"><text:span text:style-name="T196"><text:s text:c="11"/>NPL(12)=0 = NPL(7)=0 <text:s/>→ <text:s/>不需交換</text:span><text:span text:style-name="T196"/></text:p>
      <text:p text:style-name="P6" loext:marker-style-name="T196"><text:span text:style-name="T196"><text:s text:c="11"/>NPL(6) = min(0,0)+1 = 1</text:span><text:span text:style-name="T196"/></text:p>
      <text:p text:style-name="P6" loext:marker-style-name="T196"><text:span text:style-name="T196"><text:s text:c="20"/>6 <text:s/>[NPL=1]</text:span><text:span text:style-name="T196"/></text:p>
      <text:p text:style-name="P6" loext:marker-style-name="T196"><text:span text:style-name="T196"><text:s text:c="19"/>/ \</text:span><text:span text:style-name="T196"/></text:p>
      <text:p text:style-name="P6" loext:marker-style-name="T196"><text:soft-page-break/><text:span text:style-name="T196"><text:s text:c="17"/>12 <text:s text:c="2"/>7</text:span><text:span text:style-name="T196"/></text:p>
      <text:p text:style-name="P6" loext:marker-style-name="T196"><text:span text:style-name="T196"><text:s text:c="21"/>/</text:span><text:span text:style-name="T196"/></text:p>
      <text:p text:style-name="P6" loext:marker-style-name="T196"><text:span text:style-name="T196"><text:s text:c="20"/>8</text:span><text:span text:style-name="T196"/></text:p>
      <text:p text:style-name="P6"/>
      <text:p text:style-name="P6" loext:marker-style-name="T196"><text:span text:style-name="T196"><text:s text:c="2"/>Step 5：回填 Merge(A,B)：3.left=5, 3.right=6</text:span><text:span text:style-name="T196"/></text:p>
      <text:p text:style-name="P6" loext:marker-style-name="T196"><text:span text:style-name="T196"><text:s text:c="11"/>NPL(3.right=6)=1 &gt; NPL(3.left=5)=0 <text:s/>→ <text:s/>交換左右！</text:span><text:span text:style-name="T196"/></text:p>
      <text:p text:style-name="P39" loext:marker-style-name="T196"><text:span text:style-name="T196"><text:s text:c="11"/>NPL(3) = min(NPL(6),NPL(5))+1 = min(1,0)+1 = 1</text:span><text:span text:style-name="T196"/></text:p>
      <text:p text:style-name="P12"/>
      <text:p text:style-name="P10"><text:s text:c="2"/>最終合併結果（Min Leftist Heap）：</text:p>
      <text:p text:style-name="P6"/>
      <text:p text:style-name="P6" loext:marker-style-name="T196"><text:span text:style-name="T196"><text:s text:c="14"/>3 <text:s/>[NPL=1]</text:span><text:span text:style-name="T196"/></text:p>
      <text:p text:style-name="P6" loext:marker-style-name="T196"><text:span text:style-name="T196"><text:s text:c="13"/>/ \</text:span><text:span text:style-name="T196"/></text:p>
      <text:p text:style-name="P6" loext:marker-style-name="T196"><text:span text:style-name="T196"><text:s text:c="12"/>6 <text:s text:c="2"/>5 <text:s/>[NPL=0]</text:span><text:span text:style-name="T196"/></text:p>
      <text:p text:style-name="P6" loext:marker-style-name="T196"><text:span text:style-name="T196"><text:s text:c="11"/>/ \</text:span><text:span text:style-name="T196"/></text:p>
      <text:p text:style-name="P6" loext:marker-style-name="T196"><text:span text:style-name="T196"><text:s text:c="9"/>12 <text:s text:c="2"/>7 <text:s/>[NPL=0]</text:span><text:span text:style-name="T196"/></text:p>
      <text:p text:style-name="P6" loext:marker-style-name="T196"><text:span text:style-name="T196"><text:s text:c="13"/>/</text:span><text:span text:style-name="T196"/></text:p>
      <text:p text:style-name="P6" loext:marker-style-name="T196"><text:span text:style-name="T196"><text:s text:c="12"/>8</text:span><text:span text:style-name="T196"/></text:p>
      <text:p text:style-name="P6"/>
      <text:p text:style-name="P6" loext:marker-style-name="T196"><text:span text:style-name="T196"><text:s text:c="2"/>驗證 Min Heap：3&lt;6 ✓ <text:s/>3&lt;5 ✓ <text:s/>6&lt;12 ✓ <text:s/>6&lt;7 ✓ <text:s/>7&lt;8 ✓</text:span><text:span text:style-name="T196"/></text:p>
      <text:p text:style-name="P39" loext:marker-style-name="T196"><text:span text:style-name="T196"><text:s text:c="2"/>驗證左偏性：NPL(6)=1 ≥ NPL(5)=0 ✓ <text:s/>NPL(12)=0 ≥ NPL(7)=0 ✓</text:span><text:span text:style-name="T196"/></text:p>
      <text:p text:style-name="P8"/>
      <text:h text:style-name="P4" text:outline-level="2" loext:marker-style-name="T20"><text:span text:style-name="T20">8-7 <text:s/></text:span><text:span text:style-name="T21">時間複雜度與重點整理</text:span>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row table:style-name="表格47.1">
          <table:table-cell table:style-name="表格47.A1" office:value-type="string">
            <text:p text:style-name="Standard" loext:marker-style-name="T213"><text:span text:style-name="T214">操作</text:span><text:span text:style-name="T213"/></text:p>
          </table:table-cell>
          <table:table-cell table:style-name="表格47.A1" office:value-type="string">
            <text:p text:style-name="Standard" loext:marker-style-name="T213"><text:span text:style-name="T214">普通 </text:span><text:span text:style-name="T213">Binary Heap</text:span></text:p>
          </table:table-cell>
          <table:table-cell table:style-name="表格47.A1" office:value-type="string">
            <text:p text:style-name="Standard" loext:marker-style-name="T213"><text:span text:style-name="T213">Leftist Heap</text:span><text:span text:style-name="T213"/></text:p>
          </table:table-cell>
        </table:table-row>
        <table:table-row table:style-name="表格47.1">
          <table:table-cell table:style-name="表格47.A2" office:value-type="string">
            <text:p text:style-name="Standard" loext:marker-style-name="T194"><text:span text:style-name="T194">Insert</text:span><text:span text:style-name="T194"/></text:p>
          </table:table-cell>
          <table:table-cell table:style-name="表格47.A2" office:value-type="string">
            <text:p text:style-name="Standard" loext:marker-style-name="T194"><text:span text:style-name="T194">O(log n)</text:span><text:span text:style-name="T194"/></text:p>
          </table:table-cell>
          <table:table-cell table:style-name="表格47.A2" office:value-type="string">
            <text:p text:style-name="Standard" loext:marker-style-name="T194"><text:span text:style-name="T194">O(log n)</text:span><text:span text:style-name="T194"/></text:p>
          </table:table-cell>
        </table:table-row>
        <table:table-row table:style-name="表格47.1">
          <table:table-cell table:style-name="表格47.A3" office:value-type="string">
            <text:p text:style-name="Standard" loext:marker-style-name="T194"><text:span text:style-name="T194">Extract-Min/Max</text:span><text:span text:style-name="T194"/></text:p>
          </table:table-cell>
          <table:table-cell table:style-name="表格47.A3" office:value-type="string">
            <text:p text:style-name="Standard" loext:marker-style-name="T194"><text:span text:style-name="T194">O(log n)</text:span><text:span text:style-name="T194"/></text:p>
          </table:table-cell>
          <table:table-cell table:style-name="表格47.A3" office:value-type="string">
            <text:p text:style-name="Standard" loext:marker-style-name="T194"><text:span text:style-name="T194">O(log n)</text:span><text:span text:style-name="T194"/></text:p>
          </table:table-cell>
        </table:table-row>
        <table:table-row table:style-name="表格47.1">
          <table:table-cell table:style-name="表格47.A2" office:value-type="string">
            <text:p text:style-name="Standard" loext:marker-style-name="T194"><text:span text:style-name="T194">Merge</text:span><text:span text:style-name="T195">（合併兩個 </text:span><text:span text:style-name="T194">Heap</text:span><text:span text:style-name="T195">）</text:span></text:p>
          </table:table-cell>
          <table:table-cell table:style-name="表格47.A2" office:value-type="string">
            <text:p text:style-name="Standard" loext:marker-style-name="T194"><text:span text:style-name="T194">O(n+m) </text:span><text:span text:style-name="T195">重建</text:span></text:p>
          </table:table-cell>
          <table:table-cell table:style-name="表格47.A2" office:value-type="string">
            <text:p text:style-name="Standard" loext:marker-style-name="T194"><text:span text:style-name="T194">O(log n + log m) ★</text:span><text:span text:style-name="T194"/></text:p>
          </table:table-cell>
        </table:table-row>
      </table:table>
      <text:p text:style-name="P5"/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7" loext:marker-style-name="T182"><text:span text:style-name="T182">⚠️ <text:s/></text:span><text:span text:style-name="T183">重要：</text:span><text:span text:style-name="T182">Min vs. Max Leftist Heap</text:span></text:p>
            <text:p text:style-name="P7" loext:marker-style-name="T191"><text:span text:style-name="T191">Min Leftist Heap → Merge </text:span><text:span text:style-name="T192">時，較小的 </text:span><text:span text:style-name="T191">Root </text:span><text:span text:style-name="T192">成為新 </text:span><text:span text:style-name="T191">Root</text:span></text:p>
            <text:p text:style-name="P7" loext:marker-style-name="T191"><text:span text:style-name="T191">Max Leftist Heap → Merge </text:span><text:span text:style-name="T192">時，較大的 </text:span><text:span text:style-name="T191">Root </text:span><text:span text:style-name="T192">成為新 </text:span><text:span text:style-name="T191">Root</text:span></text:p>
            <text:p text:style-name="P41" loext:marker-style-name="T191"><text:span text:style-name="T192">演算法步驟完全相同，只有「誰當新 </text:span><text:span text:style-name="T191">Root</text:span><text:span text:style-name="T192">」的比較方向相反。</text:span></text:p>
          </table:table-cell>
        </table:table-row>
      </table:table>
      <text:h text:style-name="P15" text:outline-level="1" loext:marker-style-name="T176"/>
      <text:p text:style-name="P1"/>
      <text:h text:style-name="P13" text:outline-level="1" loext:marker-style-name="T3"><text:span text:style-name="T4">九、</text:span><text:span text:style-name="T10">Heap</text:span><text:span text:style-name="T11"> vs. </text:span><text:span text:style-name="T10">BST / AVL / Red-Black Tree</text:span><text:span text:style-name="T11"> </text:span><text:span text:style-name="T4">深度比較</text:span></text:h>
      <text:p text:style-name="P32" loext:marker-style-name="T29"><text:span text:style-name="T30">這是許多考生最容易混淆的地方，必須徹底釐清各資料結構的設計目的。</text:span><text:span text:style-name="T29"/></text:p>
      <text:p text:style-name="P1"/>
      <text:h text:style-name="P16" text:outline-level="2" loext:marker-style-name="T17"><text:soft-page-break/><text:span text:style-name="T18">各結構設計目的一覽</text:span><text:span text:style-name="T17"/></text:h>
      <text:p text:style-name="P1"/>
      <table:table table:name="表格49" table:style-name="表格49">
        <table:table-column table:style-name="表格49.A" table:number-columns-repeated="2"/>
        <table:table-column table:style-name="表格49.C"/>
        <table:table-header-rows>
          <table:table-row table:style-name="表格49.1">
            <table:table-cell table:style-name="表格49.A1" office:value-type="string">
              <text:p text:style-name="P31" loext:marker-style-name="T5"><text:span text:style-name="T6">結構</text:span><text:span text:style-name="T5"/></text:p>
            </table:table-cell>
            <table:table-cell table:style-name="表格49.A1" office:value-type="string">
              <text:p text:style-name="P31" loext:marker-style-name="T5"><text:span text:style-name="T6">設計目的</text:span><text:span text:style-name="T5"/></text:p>
            </table:table-cell>
            <table:table-cell table:style-name="表格49.A1" office:value-type="string">
              <text:p text:style-name="P31" loext:marker-style-name="T5"><text:span text:style-name="T6">核心保證</text:span><text:span text:style-name="T5"/></text:p>
            </table:table-cell>
          </table:table-row>
        </table:table-header-rows>
        <table:table-row table:style-name="表格49.1">
          <table:table-cell table:style-name="表格49.A2" office:value-type="string">
            <text:p text:style-name="P31" loext:marker-style-name="T40"><text:span text:style-name="T51">BST</text:span><text:span text:style-name="T40"/></text:p>
          </table:table-cell>
          <table:table-cell table:style-name="表格49.A2" office:value-type="string">
            <text:p text:style-name="P31" loext:marker-style-name="T40"><text:span text:style-name="T58">快速搜尋特定值</text:span><text:span text:style-name="T40"/></text:p>
          </table:table-cell>
          <table:table-cell table:style-name="表格49.A2" office:value-type="string">
            <text:p text:style-name="P31" loext:marker-style-name="T40"><text:span text:style-name="T58">左 </text:span><text:span text:style-name="T51">&lt; </text:span><text:span text:style-name="T58">根 </text:span><text:span text:style-name="T51">&lt; </text:span><text:span text:style-name="T58">右</text:span></text:p>
          </table:table-cell>
        </table:table-row>
        <table:table-row table:style-name="表格49.1">
          <table:table-cell table:style-name="表格49.A2" office:value-type="string">
            <text:p text:style-name="P31" loext:marker-style-name="T40"><text:span text:style-name="T51">AVL Tree</text:span><text:span text:style-name="T40"/></text:p>
          </table:table-cell>
          <table:table-cell table:style-name="表格49.A2" office:value-type="string">
            <text:p text:style-name="P31" loext:marker-style-name="T40"><text:span text:style-name="T58">平衡 </text:span><text:span text:style-name="T51">BST</text:span><text:span text:style-name="T58">，穩定搜尋</text:span></text:p>
          </table:table-cell>
          <table:table-cell table:style-name="表格49.A2" office:value-type="string">
            <text:p text:style-name="P31" loext:marker-style-name="T40"><text:span text:style-name="T58">高度差 ≤ </text:span><text:span text:style-name="T51">1</text:span><text:span text:style-name="T58">，</text:span><text:span text:style-name="T51">h = O(log n)</text:span></text:p>
          </table:table-cell>
        </table:table-row>
        <table:table-row table:style-name="表格49.1">
          <table:table-cell table:style-name="表格49.A2" office:value-type="string">
            <text:p text:style-name="P31" loext:marker-style-name="T40"><text:span text:style-name="T51">Red-Black Tree</text:span><text:span text:style-name="T40"/></text:p>
          </table:table-cell>
          <table:table-cell table:style-name="表格49.A2" office:value-type="string">
            <text:p text:style-name="P31" loext:marker-style-name="T40"><text:span text:style-name="T58">平衡 </text:span><text:span text:style-name="T51">BST</text:span><text:span text:style-name="T58">，減少旋轉</text:span></text:p>
          </table:table-cell>
          <table:table-cell table:style-name="表格49.A2" office:value-type="string">
            <text:p text:style-name="P31" loext:marker-style-name="T40"><text:span text:style-name="T58">顏色規則，</text:span><text:span text:style-name="T51">h = O(log n)</text:span></text:p>
          </table:table-cell>
        </table:table-row>
        <table:table-row table:style-name="表格49.1">
          <table:table-cell table:style-name="表格49.A2" office:value-type="string">
            <text:p text:style-name="P31" loext:marker-style-name="T40"><text:span text:style-name="T51">Heap</text:span><text:span text:style-name="T40"/></text:p>
          </table:table-cell>
          <table:table-cell table:style-name="表格49.A2" office:value-type="string">
            <text:p text:style-name="P31" loext:marker-style-name="T40"><text:span text:style-name="T58">快速取最大</text:span><text:span text:style-name="T51">/</text:span><text:span text:style-name="T58">最小值</text:span></text:p>
          </table:table-cell>
          <table:table-cell table:style-name="表格49.A2" office:value-type="string">
            <text:p text:style-name="P31" loext:marker-style-name="T40"><text:span text:style-name="T58">父 ≥ 子（</text:span><text:span text:style-name="T51">Max</text:span><text:span text:style-name="T58">）或父 ≤ 子（</text:span><text:span text:style-name="T51">Min</text:span><text:span text:style-name="T58">）</text:span></text:p>
          </table:table-cell>
        </table:table-row>
      </table:table>
      <text:p text:style-name="P1"/>
      <text:h text:style-name="P16" text:outline-level="2" loext:marker-style-name="T17"><text:span text:style-name="T18">時間複雜度全比較</text:span><text:span text:style-name="T17"/></text:h>
      <text:p text:style-name="P1"/>
      <table:table table:name="表格50" table:style-name="表格50">
        <table:table-column table:style-name="表格50.A" table:number-columns-repeated="4"/>
        <table:table-header-rows>
          <table:table-row table:style-name="表格50.1">
            <table:table-cell table:style-name="表格50.A1" office:value-type="string">
              <text:p text:style-name="P31" loext:marker-style-name="T5"><text:span text:style-name="T13">操作</text:span><text:span text:style-name="T5"/></text:p>
            </table:table-cell>
            <table:table-cell table:style-name="表格50.A1" office:value-type="string">
              <text:p text:style-name="P31" loext:marker-style-name="T5"><text:span text:style-name="T14">BST</text:span><text:span text:style-name="T13">（平衡）</text:span><text:span text:style-name="T14">/ AVL / RB</text:span></text:p>
            </table:table-cell>
            <table:table-cell table:style-name="表格50.A1" office:value-type="string">
              <text:p text:style-name="P31" loext:marker-style-name="T5"><text:span text:style-name="T14">Heap</text:span><text:span text:style-name="T5"/></text:p>
            </table:table-cell>
            <table:table-cell table:style-name="表格50.A1" office:value-type="string">
              <text:p text:style-name="P31" loext:marker-style-name="T5"><text:span text:style-name="T13">說明</text:span><text:span text:style-name="T5"/></text:p>
            </table:table-cell>
          </table:table-row>
        </table:table-header-rows>
        <table:table-row table:style-name="表格50.1">
          <table:table-cell table:style-name="表格50.A2" office:value-type="string">
            <text:p text:style-name="P31" loext:marker-style-name="T40"><text:span text:style-name="T58">搜尋特定值</text:span><text:span text:style-name="T40"/></text:p>
          </table:table-cell>
          <table:table-cell table:style-name="表格50.A2" office:value-type="string">
            <text:p text:style-name="P31" loext:marker-style-name="T40"><text:span text:style-name="T51">O(log n)</text:span><text:span text:style-name="T40"/></text:p>
          </table:table-cell>
          <table:table-cell table:style-name="表格50.A2" office:value-type="string">
            <text:p text:style-name="P31" loext:marker-style-name="T40"><text:span text:style-name="T51">❌ O(n)</text:span><text:span text:style-name="T40"/></text:p>
          </table:table-cell>
          <table:table-cell table:style-name="表格50.A2" office:value-type="string">
            <text:p text:style-name="P31" loext:marker-style-name="T40"><text:span text:style-name="T51">Heap </text:span><text:span text:style-name="T58">無排序規則</text:span></text:p>
          </table:table-cell>
        </table:table-row>
        <table:table-row table:style-name="表格50.1">
          <table:table-cell table:style-name="表格50.A3" office:value-type="string">
            <text:p text:style-name="P31" loext:marker-style-name="T40"><text:span text:style-name="T58">找最大值（</text:span><text:span text:style-name="T51">view</text:span><text:span text:style-name="T58">）</text:span></text:p>
          </table:table-cell>
          <table:table-cell table:style-name="表格50.A3" office:value-type="string">
            <text:p text:style-name="P31" loext:marker-style-name="T40"><text:span text:style-name="T51">O(log n)</text:span><text:span text:style-name="T40"/></text:p>
          </table:table-cell>
          <table:table-cell table:style-name="表格50.A3" office:value-type="string">
            <text:p text:style-name="P31" loext:marker-style-name="T40"><text:span text:style-name="T51">✅ O(1)</text:span><text:span text:style-name="T40"/></text:p>
          </table:table-cell>
          <table:table-cell table:style-name="表格50.A3" office:value-type="string">
            <text:p text:style-name="P31" loext:marker-style-name="T40"><text:span text:style-name="T51">Heap Root </text:span><text:span text:style-name="T58">即最大值</text:span></text:p>
          </table:table-cell>
        </table:table-row>
        <table:table-row table:style-name="表格50.1">
          <table:table-cell table:style-name="表格50.A2" office:value-type="string">
            <text:p text:style-name="P31" loext:marker-style-name="T40"><text:span text:style-name="T51">Extract-Max</text:span><text:span text:style-name="T40"/></text:p>
          </table:table-cell>
          <table:table-cell table:style-name="表格50.A2" office:value-type="string">
            <text:p text:style-name="P31" loext:marker-style-name="T40"><text:span text:style-name="T51">O(log n)</text:span><text:span text:style-name="T40"/></text:p>
          </table:table-cell>
          <table:table-cell table:style-name="表格50.A2" office:value-type="string">
            <text:p text:style-name="P31" loext:marker-style-name="T40"><text:span text:style-name="T51">O(log n)</text:span><text:span text:style-name="T40"/></text:p>
          </table:table-cell>
          <table:table-cell table:style-name="表格50.A2" office:value-type="string">
            <text:p text:style-name="P31" loext:marker-style-name="T40"><text:span text:style-name="T58">相同</text:span><text:span text:style-name="T40"/></text:p>
          </table:table-cell>
        </table:table-row>
        <table:table-row table:style-name="表格50.1">
          <table:table-cell table:style-name="表格50.A3" office:value-type="string">
            <text:p text:style-name="P31" loext:marker-style-name="T40"><text:span text:style-name="T51">Insert</text:span><text:span text:style-name="T40"/></text:p>
          </table:table-cell>
          <table:table-cell table:style-name="表格50.A3" office:value-type="string">
            <text:p text:style-name="P31" loext:marker-style-name="T40"><text:span text:style-name="T51">O(log n)</text:span><text:span text:style-name="T40"/></text:p>
          </table:table-cell>
          <table:table-cell table:style-name="表格50.A3" office:value-type="string">
            <text:p text:style-name="P31" loext:marker-style-name="T40"><text:span text:style-name="T51">O(log n)</text:span><text:span text:style-name="T40"/></text:p>
          </table:table-cell>
          <table:table-cell table:style-name="表格50.A3" office:value-type="string">
            <text:p text:style-name="P31" loext:marker-style-name="T40"><text:span text:style-name="T58">相同</text:span><text:span text:style-name="T40"/></text:p>
          </table:table-cell>
        </table:table-row>
        <table:table-row table:style-name="表格50.1">
          <table:table-cell table:style-name="表格50.A2" office:value-type="string">
            <text:p text:style-name="P31" loext:marker-style-name="T40"><text:span text:style-name="T51">Delete </text:span><text:span text:style-name="T58">任意</text:span></text:p>
          </table:table-cell>
          <table:table-cell table:style-name="表格50.A2" office:value-type="string">
            <text:p text:style-name="P31" loext:marker-style-name="T40"><text:span text:style-name="T51">O(log n)</text:span><text:span text:style-name="T40"/></text:p>
          </table:table-cell>
          <table:table-cell table:style-name="表格50.A2" office:value-type="string">
            <text:p text:style-name="P31" loext:marker-style-name="T40"><text:span text:style-name="T51">O(n) </text:span><text:span text:style-name="T58">找 </text:span><text:span text:style-name="T51">+ O(log n) </text:span><text:span text:style-name="T58">刪</text:span></text:p>
          </table:table-cell>
          <table:table-cell table:style-name="表格50.A2" office:value-type="string">
            <text:p text:style-name="P31" loext:marker-style-name="T40"><text:span text:style-name="T51">Heap </text:span><text:span text:style-name="T58">找到要刪的節點要 </text:span><text:span text:style-name="T51">O(n)</text:span></text:p>
          </table:table-cell>
        </table:table-row>
      </table:table>
      <text:p text:style-name="P1"/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2" loext:marker-style-name="T40"><text:span text:style-name="T51">⚠️ <text:s/></text:span><text:span text:style-name="T58">公職超高頻陷阱題：</text:span></text:p>
          </table:table-cell>
        </table:table-row>
        <table:table-row table:style-name="表格51.1">
          <table:table-cell table:style-name="表格51.A1" office:value-type="string">
            <text:p text:style-name="P2" loext:marker-style-name="T40"><text:span text:style-name="T58">「</text:span><text:span text:style-name="T51">Max Heap </text:span><text:span text:style-name="T58">搜尋某元素的時間複雜度為何？」</text:span></text:p>
          </table:table-cell>
        </table:table-row>
        <table:table-row table:style-name="表格51.1">
          <table:table-cell table:style-name="表格51.A1" office:value-type="string">
            <text:p text:style-name="P2"/>
          </table:table-cell>
        </table:table-row>
        <table:table-row table:style-name="表格51.1">
          <table:table-cell table:style-name="表格51.A1" office:value-type="string">
            <text:p text:style-name="P2" loext:marker-style-name="T40"><text:span text:style-name="T51">❌ </text:span><text:span text:style-name="T58">錯誤答案：</text:span><text:span text:style-name="T51">O(log n) <text:s/>← </text:span><text:span text:style-name="T58">看到樹就聯想 </text:span><text:span text:style-name="T51">log n </text:span><text:span text:style-name="T58">是常見誤區</text:span></text:p>
          </table:table-cell>
        </table:table-row>
        <table:table-row table:style-name="表格51.1">
          <table:table-cell table:style-name="表格51.A1" office:value-type="string">
            <text:p text:style-name="P2" loext:marker-style-name="T40"><text:span text:style-name="T51">✅ </text:span><text:span text:style-name="T58">正確答案：</text:span><text:span text:style-name="T51">O(n)</text:span></text:p>
          </table:table-cell>
        </table:table-row>
        <table:table-row table:style-name="表格51.1">
          <table:table-cell table:style-name="表格51.A1" office:value-type="string">
            <text:p text:style-name="P2"/>
          </table:table-cell>
        </table:table-row>
        <table:table-row table:style-name="表格51.1">
          <table:table-cell table:style-name="表格51.A1" office:value-type="string">
            <text:p text:style-name="P2" loext:marker-style-name="T40"><text:span text:style-name="T58">原因：</text:span><text:span text:style-name="T51">Heap </text:span><text:span text:style-name="T58">只保證「父 ≥ 子」，無法判斷目標在左或右子樹，</text:span></text:p>
          </table:table-cell>
        </table:table-row>
        <table:table-row table:style-name="表格51.1">
          <table:table-cell table:style-name="表格51.A1" office:value-type="string">
            <text:p text:style-name="P2" loext:marker-style-name="T40"><text:span text:style-name="T51"><text:s text:c="6"/></text:span><text:span text:style-name="T58">最壞情況需掃描所有節點。</text:span></text:p>
          </table:table-cell>
        </table:table-row>
      </table:table>
      <text:p text:style-name="P1"/>
      <text:h text:style-name="P16" text:outline-level="2" loext:marker-style-name="T17"><text:span text:style-name="T18">為什麼 </text:span><text:span text:style-name="T25">Linux</text:span><text:span text:style-name="T26"> </text:span><text:span text:style-name="T18">選擇 </text:span><text:span text:style-name="T25">Red-Black Tree</text:span><text:span text:style-name="T26"> </text:span><text:span text:style-name="T18">而非 </text:span><text:span text:style-name="T25">AVL</text:span><text:span text:style-name="T18">？</text:span></text:h>
      <text:list text:continue-list="list1695230943" text:style-name="WWNum2">
        <text:list-item>
          <text:p text:style-name="P35" loext:marker-style-name="T29"><text:span text:style-name="T50">AVL</text:span><text:span text:style-name="T30">：搜尋最快，但插入</text:span><text:span text:style-name="T50">/</text:span><text:span text:style-name="T30">刪除旋轉次數多，修改成本高。</text:span></text:p>
        </text:list-item>
        <text:list-item>
          <text:p text:style-name="P35" loext:marker-style-name="T29"><text:span text:style-name="T50">Red-Black Tree</text:span><text:span text:style-name="T30">：搜尋稍慢，但插入</text:span><text:span text:style-name="T50">/</text:span><text:span text:style-name="T30">刪除旋轉較少，整體效能均衡。</text:span></text:p>
        </text:list-item>
        <text:list-item>
          <text:p text:style-name="P35" loext:marker-style-name="T29"><text:span text:style-name="T50">Linux Kernel </text:span><text:span text:style-name="T30">的 </text:span><text:span text:style-name="T50">CFS </text:span><text:span text:style-name="T30">排程器、記憶體管理（</text:span><text:span text:style-name="T50">VMA</text:span><text:span text:style-name="T30">）、</text:span><text:span text:style-name="T50">Timer </text:span><text:span text:style-name="T30">均採用 </text:span><text:span text:style-name="T50">Red-Black Tree</text:span><text:span text:style-name="T30">。</text:span></text:p>
        </text:list-item>
      </text:list>
      <text:p text:style-name="P1"/>
      <text:p text:style-name="P1"/>
      <text:h text:style-name="P13" text:outline-level="1" loext:marker-style-name="T3"><text:soft-page-break/><text:span text:style-name="T4">十、公職考試常見陷阱整理</text:span><text:span text:style-name="T3"/></text:h>
      <text:p text:style-name="P1"/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2" loext:marker-style-name="T40"><text:span text:style-name="T58">陷阱 </text:span><text:span text:style-name="T51">1</text:span><text:span text:style-name="T58">：</text:span><text:span text:style-name="T51">Heap </text:span><text:span text:style-name="T58">搜尋 ≠ </text:span><text:span text:style-name="T51">O(log n)</text:span><text:span text:style-name="T58">，正確為 </text:span><text:span text:style-name="T51">O(n)</text:span><text:span text:style-name="T58">。</text:span></text:p>
          </table:table-cell>
        </table:table-row>
        <table:table-row table:style-name="表格52.1">
          <table:table-cell table:style-name="表格52.A1" office:value-type="string">
            <text:p text:style-name="P2"/>
          </table:table-cell>
        </table:table-row>
        <table:table-row table:style-name="表格52.1">
          <table:table-cell table:style-name="表格52.A1" office:value-type="string">
            <text:p text:style-name="P2" loext:marker-style-name="T40"><text:span text:style-name="T58">陷阱 </text:span><text:span text:style-name="T51">2</text:span><text:span text:style-name="T58">：</text:span><text:span text:style-name="T51">Build Heap ≠ O(n log n)</text:span><text:span text:style-name="T58">，</text:span><text:span text:style-name="T51">Bottom-Up </text:span><text:span text:style-name="T58">法正確為 </text:span><text:span text:style-name="T51">O(n)</text:span><text:span text:style-name="T58">。</text:span></text:p>
          </table:table-cell>
        </table:table-row>
        <table:table-row table:style-name="表格52.1">
          <table:table-cell table:style-name="表格52.A1" office:value-type="string">
            <text:p text:style-name="P2"/>
          </table:table-cell>
        </table:table-row>
        <table:table-row table:style-name="表格52.1">
          <table:table-cell table:style-name="表格52.A1" office:value-type="string">
            <text:p text:style-name="P2" loext:marker-style-name="T40"><text:span text:style-name="T58">陷阱 </text:span><text:span text:style-name="T51">3</text:span><text:span text:style-name="T58">：</text:span><text:span text:style-name="T51">Heap </text:span><text:span text:style-name="T58">是 </text:span><text:span text:style-name="T51">Complete Binary Tree</text:span><text:span text:style-name="T58">，不是 </text:span><text:span text:style-name="T51">Full Binary Tree</text:span><text:span text:style-name="T58">。</text:span></text:p>
          </table:table-cell>
        </table:table-row>
        <table:table-row table:style-name="表格52.1">
          <table:table-cell table:style-name="表格52.A1" office:value-type="string">
            <text:p text:style-name="P2"/>
          </table:table-cell>
        </table:table-row>
        <table:table-row table:style-name="表格52.1">
          <table:table-cell table:style-name="表格52.A1" office:value-type="string">
            <text:p text:style-name="P2" loext:marker-style-name="T40"><text:span text:style-name="T58">陷阱 </text:span><text:span text:style-name="T51">4</text:span><text:span text:style-name="T58">：陣列索引從 </text:span><text:span text:style-name="T51">1 </text:span><text:span text:style-name="T58">開始，</text:span><text:span text:style-name="T51">parent = ⌊i/2⌋</text:span><text:span text:style-name="T58">（整數除法）。</text:span></text:p>
          </table:table-cell>
        </table:table-row>
        <table:table-row table:style-name="表格52.1">
          <table:table-cell table:style-name="表格52.A1" office:value-type="string">
            <text:p text:style-name="P2"/>
          </table:table-cell>
        </table:table-row>
        <table:table-row table:style-name="表格52.1">
          <table:table-cell table:style-name="表格52.A1" office:value-type="string">
            <text:p text:style-name="P2" loext:marker-style-name="T40"><text:span text:style-name="T58">陷阱 </text:span><text:span text:style-name="T51">5</text:span><text:span text:style-name="T58">：</text:span><text:span text:style-name="T51">Interval Heap </text:span><text:span text:style-name="T58">每個節點存的是區間 </text:span><text:span text:style-name="T51">[min, max]</text:span><text:span text:style-name="T58">，不是單一值。</text:span></text:p>
          </table:table-cell>
        </table:table-row>
        <table:table-row table:style-name="表格52.1">
          <table:table-cell table:style-name="表格52.A1" office:value-type="string">
            <text:p text:style-name="P2"/>
          </table:table-cell>
        </table:table-row>
        <table:table-row table:style-name="表格52.1">
          <table:table-cell table:style-name="表格52.A1" office:value-type="string">
            <text:p text:style-name="P2" loext:marker-style-name="T40"><text:span text:style-name="T58">陷阱 </text:span><text:span text:style-name="T51">6</text:span><text:span text:style-name="T58">：</text:span><text:span text:style-name="T51">Merge Leftist Heap </text:span><text:span text:style-name="T58">的新 </text:span><text:span text:style-name="T51">Root </text:span><text:span text:style-name="T58">是兩個 </text:span><text:span text:style-name="T51">Root </text:span><text:span text:style-name="T58">中較小的（</text:span><text:span text:style-name="T51">Min Heap</text:span><text:span text:style-name="T58">），</text:span></text:p>
          </table:table-cell>
        </table:table-row>
        <table:table-row table:style-name="表格52.1">
          <table:table-cell table:style-name="表格52.A1" office:value-type="string">
            <text:p text:style-name="P2" loext:marker-style-name="T40"><text:span text:style-name="T51"><text:s text:c="8"/>Max Leftist Heap </text:span><text:span text:style-name="T58">則是較大的。</text:span></text:p>
          </table:table-cell>
        </table:table-row>
        <table:table-row table:style-name="表格52.1">
          <table:table-cell table:style-name="表格52.A1" office:value-type="string">
            <text:p text:style-name="P2"/>
          </table:table-cell>
        </table:table-row>
        <table:table-row table:style-name="表格52.1">
          <table:table-cell table:style-name="表格52.A1" office:value-type="string">
            <text:p text:style-name="P2" loext:marker-style-name="T40"><text:span text:style-name="T58">陷阱 </text:span><text:span text:style-name="T51">7</text:span><text:span text:style-name="T58">：</text:span><text:span text:style-name="T51">Heap Sort </text:span><text:span text:style-name="T58">是 </text:span><text:span text:style-name="T51">Unstable Sort</text:span><text:span text:style-name="T58">（不穩定排序）。</text:span></text:p>
          </table:table-cell>
        </table:table-row>
        <table:table-row table:style-name="表格52.1">
          <table:table-cell table:style-name="表格52.A1" office:value-type="string">
            <text:p text:style-name="P2"/>
          </table:table-cell>
        </table:table-row>
        <table:table-row table:style-name="表格52.1">
          <table:table-cell table:style-name="表格52.A1" office:value-type="string">
            <text:p text:style-name="P2" loext:marker-style-name="T40"><text:span text:style-name="T58">陷阱 </text:span><text:span text:style-name="T51">8</text:span><text:span text:style-name="T58">：</text:span><text:span text:style-name="T51">Heap Sort </text:span><text:span text:style-name="T58">空間複雜度是 </text:span><text:span text:style-name="T51">O(1)</text:span><text:span text:style-name="T58">（</text:span><text:span text:style-name="T51">In-place</text:span><text:span text:style-name="T58">），不需額外空間。</text:span></text:p>
          </table:table-cell>
        </table:table-row>
      </table:table>
      <text:p text:style-name="P1"/>
      <text:p text:style-name="P1"/>
      <text:h text:style-name="P13" text:outline-level="1" loext:marker-style-name="T3"><text:span text:style-name="T4">十一、考試必背速查表（最終記憶版）</text:span><text:span text:style-name="T3"/></text:h>
      <text:p text:style-name="P1"/>
      <text:h text:style-name="P16" text:outline-level="2" loext:marker-style-name="T17"><text:span text:style-name="T18">核心定義</text:span><text:span text:style-name="T17"/></text:h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2" loext:marker-style-name="T40"><text:span text:style-name="T51">Heap = Complete Binary Tree + Heap Property</text:span><text:span text:style-name="T58">（</text:span><text:span text:style-name="T51">parent ≤/≥ child</text:span><text:span text:style-name="T58">）</text:span></text:p>
          </table:table-cell>
        </table:table-row>
        <table:table-row table:style-name="表格53.1">
          <table:table-cell table:style-name="表格53.A1" office:value-type="string">
            <text:p text:style-name="P2"/>
          </table:table-cell>
        </table:table-row>
        <table:table-row table:style-name="表格53.1">
          <table:table-cell table:style-name="表格53.A1" office:value-type="string">
            <text:p text:style-name="P2" loext:marker-style-name="T40"><text:span text:style-name="T58">陣列索引（從 </text:span><text:span text:style-name="T51">1 </text:span><text:span text:style-name="T58">起）：</text:span></text:p>
          </table:table-cell>
        </table:table-row>
        <table:table-row table:style-name="表格53.1">
          <table:table-cell table:style-name="表格53.A1" office:value-type="string">
            <text:p text:style-name="P2" loext:marker-style-name="T40"><text:span text:style-name="T51"><text:s text:c="2"/>Root <text:s text:c="4"/>= A[1]</text:span><text:span text:style-name="T40"/></text:p>
          </table:table-cell>
        </table:table-row>
        <table:table-row table:style-name="表格53.1">
          <table:table-cell table:style-name="表格53.A1" office:value-type="string">
            <text:p text:style-name="P2" loext:marker-style-name="T40"><text:span text:style-name="T51"><text:s text:c="2"/>Parent(i) = A[⌊i/2⌋]</text:span><text:span text:style-name="T40"/></text:p>
          </table:table-cell>
        </table:table-row>
        <table:table-row table:style-name="表格53.1">
          <table:table-cell table:style-name="表格53.A1" office:value-type="string">
            <text:p text:style-name="P2" loext:marker-style-name="T40"><text:span text:style-name="T51"><text:s text:c="2"/>Left(i) <text:s/>= A[2i]</text:span><text:span text:style-name="T40"/></text:p>
          </table:table-cell>
        </table:table-row>
        <text:soft-page-break/>
        <table:table-row table:style-name="表格53.1">
          <table:table-cell table:style-name="表格53.A1" office:value-type="string">
            <text:p text:style-name="P2" loext:marker-style-name="T40"><text:span text:style-name="T51"><text:s text:c="2"/>Right(i) = A[2i+1]</text:span><text:span text:style-name="T40"/></text:p>
          </table:table-cell>
        </table:table-row>
      </table:table>
      <text:p text:style-name="P1"/>
      <text:h text:style-name="P16" text:outline-level="2" loext:marker-style-name="T17"><text:span text:style-name="T18">時間複雜度速查</text:span><text:span text:style-name="T17"/></text:h>
      <text:p text:style-name="P1"/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31" loext:marker-style-name="T5"><text:span text:style-name="T6">操作</text:span><text:span text:style-name="T5"/></text:p>
            </table:table-cell>
            <table:table-cell table:style-name="表格54.A1" office:value-type="string">
              <text:p text:style-name="P31" loext:marker-style-name="T5"><text:span text:style-name="T6">時間複雜度</text:span><text:span text:style-name="T5"/></text:p>
            </table:table-cell>
            <table:table-cell table:style-name="表格54.A1" office:value-type="string">
              <text:p text:style-name="P31" loext:marker-style-name="T5"><text:span text:style-name="T6">原因</text:span><text:span text:style-name="T5"/>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31" loext:marker-style-name="T40"><text:span text:style-name="T51">Insert</text:span><text:span text:style-name="T58">（</text:span><text:span text:style-name="T51">Bubble Up</text:span><text:span text:style-name="T58">）</text:span></text:p>
          </table:table-cell>
          <table:table-cell table:style-name="表格54.A2" office:value-type="string">
            <text:p text:style-name="P31" loext:marker-style-name="T40"><text:span text:style-name="T51">O(log n)</text:span><text:span text:style-name="T40"/></text:p>
          </table:table-cell>
          <table:table-cell table:style-name="表格54.A2" office:value-type="string">
            <text:p text:style-name="P31" loext:marker-style-name="T40"><text:span text:style-name="T58">最多走 </text:span><text:span text:style-name="T51">h = log n </text:span><text:span text:style-name="T58">層</text:span></text:p>
          </table:table-cell>
        </table:table-row>
        <table:table-row table:style-name="表格54.1">
          <table:table-cell table:style-name="表格54.A2" office:value-type="string">
            <text:p text:style-name="P31" loext:marker-style-name="T40"><text:span text:style-name="T51">Extract-Max</text:span><text:span text:style-name="T58">（</text:span><text:span text:style-name="T51">Heapify</text:span><text:span text:style-name="T58">）</text:span></text:p>
          </table:table-cell>
          <table:table-cell table:style-name="表格54.A2" office:value-type="string">
            <text:p text:style-name="P31" loext:marker-style-name="T40"><text:span text:style-name="T51">O(log n)</text:span><text:span text:style-name="T40"/></text:p>
          </table:table-cell>
          <table:table-cell table:style-name="表格54.A2" office:value-type="string">
            <text:p text:style-name="P31" loext:marker-style-name="T40"><text:span text:style-name="T58">最多走 </text:span><text:span text:style-name="T51">h = log n </text:span><text:span text:style-name="T58">層</text:span></text:p>
          </table:table-cell>
        </table:table-row>
        <table:table-row table:style-name="表格54.1">
          <table:table-cell table:style-name="表格54.A2" office:value-type="string">
            <text:p text:style-name="P31" loext:marker-style-name="T40"><text:span text:style-name="T51">Build Heap</text:span><text:span text:style-name="T58">（</text:span><text:span text:style-name="T51">Bottom-Up</text:span><text:span text:style-name="T58">）</text:span></text:p>
          </table:table-cell>
          <table:table-cell table:style-name="表格54.A2" office:value-type="string">
            <text:p text:style-name="P31" loext:marker-style-name="T40"><text:span text:style-name="T51">O(n) ★</text:span><text:span text:style-name="T40"/></text:p>
          </table:table-cell>
          <table:table-cell table:style-name="表格54.A2" office:value-type="string">
            <text:p text:style-name="P31" loext:marker-style-name="T40"><text:span text:style-name="T51">Floyd </text:span><text:span text:style-name="T58">演算法</text:span></text:p>
          </table:table-cell>
        </table:table-row>
        <table:table-row table:style-name="表格54.1">
          <table:table-cell table:style-name="表格54.A2" office:value-type="string">
            <text:p text:style-name="P31" loext:marker-style-name="T40"><text:span text:style-name="T58">逐個 </text:span><text:span text:style-name="T51">Insert </text:span><text:span text:style-name="T58">建 </text:span><text:span text:style-name="T51">Heap</text:span></text:p>
          </table:table-cell>
          <table:table-cell table:style-name="表格54.A2" office:value-type="string">
            <text:p text:style-name="P31" loext:marker-style-name="T40"><text:span text:style-name="T51">O(n log n)</text:span><text:span text:style-name="T40"/></text:p>
          </table:table-cell>
          <table:table-cell table:style-name="表格54.A2" office:value-type="string">
            <text:p text:style-name="P31" loext:marker-style-name="T40"><text:span text:style-name="T51">n </text:span><text:span text:style-name="T58">次 </text:span><text:span text:style-name="T51">× O(log n)</text:span></text:p>
          </table:table-cell>
        </table:table-row>
        <table:table-row table:style-name="表格54.1">
          <table:table-cell table:style-name="表格54.A2" office:value-type="string">
            <text:p text:style-name="P31" loext:marker-style-name="T40"><text:span text:style-name="T51">Heap Sort</text:span><text:span text:style-name="T40"/></text:p>
          </table:table-cell>
          <table:table-cell table:style-name="表格54.A2" office:value-type="string">
            <text:p text:style-name="P31" loext:marker-style-name="T40"><text:span text:style-name="T51">O(n log n)</text:span><text:span text:style-name="T40"/></text:p>
          </table:table-cell>
          <table:table-cell table:style-name="表格54.A2" office:value-type="string">
            <text:p text:style-name="P31" loext:marker-style-name="T40"><text:span text:style-name="T51">O(n) + O(n log n)</text:span><text:span text:style-name="T40"/></text:p>
          </table:table-cell>
        </table:table-row>
        <table:table-row table:style-name="表格54.1">
          <table:table-cell table:style-name="表格54.A2" office:value-type="string">
            <text:p text:style-name="P31" loext:marker-style-name="T40"><text:span text:style-name="T58">搜尋特定值</text:span><text:span text:style-name="T40"/></text:p>
          </table:table-cell>
          <table:table-cell table:style-name="表格54.A2" office:value-type="string">
            <text:p text:style-name="P31" loext:marker-style-name="T40"><text:span text:style-name="T51">O(n)</text:span><text:span text:style-name="T40"/></text:p>
          </table:table-cell>
          <table:table-cell table:style-name="表格54.A2" office:value-type="string">
            <text:p text:style-name="P31" loext:marker-style-name="T40"><text:span text:style-name="T58">無左右排序規則</text:span><text:span text:style-name="T40"/></text:p>
          </table:table-cell>
        </table:table-row>
        <table:table-row table:style-name="表格54.1">
          <table:table-cell table:style-name="表格54.A2" office:value-type="string">
            <text:p text:style-name="P31" loext:marker-style-name="T40"><text:span text:style-name="T51">Merge (Leftist Heap)</text:span><text:span text:style-name="T40"/></text:p>
          </table:table-cell>
          <table:table-cell table:style-name="表格54.A2" office:value-type="string">
            <text:p text:style-name="P31" loext:marker-style-name="T40"><text:span text:style-name="T51">O(log n + log m)</text:span><text:span text:style-name="T40"/></text:p>
          </table:table-cell>
          <table:table-cell table:style-name="表格54.A2" office:value-type="string">
            <text:p text:style-name="P31" loext:marker-style-name="T40"><text:span text:style-name="T58">右側路徑短</text:span><text:span text:style-name="T40"/></text:p>
          </table:table-cell>
        </table:table-row>
      </table:table>
      <text:p text:style-name="P1"/>
      <text:h text:style-name="P16" text:outline-level="2" loext:marker-style-name="T17"><text:span text:style-name="T26">Priority Queue </text:span><text:span text:style-name="T18">三種實作比較</text:span></text:h>
      <text:p text:style-name="P1"/>
      <table:table table:name="表格55" table:style-name="表格55">
        <table:table-column table:style-name="表格55.A" table:number-columns-repeated="3"/>
        <table:table-header-rows>
          <table:table-row table:style-name="表格55.1">
            <table:table-cell table:style-name="表格55.A1" office:value-type="string">
              <text:p text:style-name="P31" loext:marker-style-name="T5"><text:span text:style-name="T6">實作</text:span><text:span text:style-name="T5"/></text:p>
            </table:table-cell>
            <table:table-cell table:style-name="表格55.A1" office:value-type="string">
              <text:p text:style-name="P31" loext:marker-style-name="T5"><text:span text:style-name="T13">Insert</text:span><text:span text:style-name="T5"/></text:p>
            </table:table-cell>
            <table:table-cell table:style-name="表格55.A1" office:value-type="string">
              <text:p text:style-name="P31" loext:marker-style-name="T5"><text:span text:style-name="T13">Extract-Max</text:span><text:span text:style-name="T5"/>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31" loext:marker-style-name="T40"><text:span text:style-name="T58">排序陣列</text:span><text:span text:style-name="T40"/></text:p>
          </table:table-cell>
          <table:table-cell table:style-name="表格55.A2" office:value-type="string">
            <text:p text:style-name="P31" loext:marker-style-name="T40"><text:span text:style-name="T51">O(n)</text:span><text:span text:style-name="T40"/></text:p>
          </table:table-cell>
          <table:table-cell table:style-name="表格55.A2" office:value-type="string">
            <text:p text:style-name="P31" loext:marker-style-name="T40"><text:span text:style-name="T51">O(1) <text:s/></text:span><text:span text:style-name="T58">取快插慢</text:span></text:p>
          </table:table-cell>
        </table:table-row>
        <table:table-row table:style-name="表格55.1">
          <table:table-cell table:style-name="表格55.A2" office:value-type="string">
            <text:p text:style-name="P31" loext:marker-style-name="T40"><text:span text:style-name="T58">未排序陣列</text:span><text:span text:style-name="T40"/></text:p>
          </table:table-cell>
          <table:table-cell table:style-name="表格55.A2" office:value-type="string">
            <text:p text:style-name="P31" loext:marker-style-name="T40"><text:span text:style-name="T51">O(1)</text:span><text:span text:style-name="T40"/></text:p>
          </table:table-cell>
          <table:table-cell table:style-name="表格55.A2" office:value-type="string">
            <text:p text:style-name="P31" loext:marker-style-name="T40"><text:span text:style-name="T51">O(n) <text:s/></text:span><text:span text:style-name="T58">插快取慢</text:span></text:p>
          </table:table-cell>
        </table:table-row>
        <table:table-row table:style-name="表格55.1">
          <table:table-cell table:style-name="表格55.A4" office:value-type="string">
            <text:p text:style-name="P31" loext:marker-style-name="T40"><text:span text:style-name="T51">Max Heap ★</text:span><text:span text:style-name="T40"/></text:p>
          </table:table-cell>
          <table:table-cell table:style-name="表格55.A4" office:value-type="string">
            <text:p text:style-name="P31" loext:marker-style-name="T40"><text:span text:style-name="T51">O(log n)</text:span><text:span text:style-name="T40"/></text:p>
          </table:table-cell>
          <table:table-cell table:style-name="表格55.A4" office:value-type="string">
            <text:p text:style-name="P31" loext:marker-style-name="T40"><text:span text:style-name="T51">O(log n) <text:s/></text:span><text:span text:style-name="T58">最均衡</text:span></text:p>
          </table:table-cell>
        </table:table-row>
      </table:table>
      <text:p text:style-name="P1"/>
      <text:h text:style-name="P16" text:outline-level="2" loext:marker-style-name="T17"><text:span text:style-name="T26">8 </text:span><text:span text:style-name="T18">句考試必背口訣</text:span></text:h>
      <text:p text:style-name="P1"/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2" loext:marker-style-name="T40"><text:span text:style-name="T51">1. <text:s/>Heap = Complete BT + Heap Property</text:span><text:span text:style-name="T40"/></text:p>
          </table:table-cell>
        </table:table-row>
        <table:table-row table:style-name="表格56.1">
          <table:table-cell table:style-name="表格56.A1" office:value-type="string">
            <text:p text:style-name="P2" loext:marker-style-name="T40"><text:span text:style-name="T51">2. <text:s/>parent = A[⌊i/2⌋]</text:span><text:span text:style-name="T40"/></text:p>
          </table:table-cell>
        </table:table-row>
        <table:table-row table:style-name="表格56.1">
          <table:table-cell table:style-name="表格56.A1" office:value-type="string">
            <text:p text:style-name="P2" loext:marker-style-name="T40"><text:span text:style-name="T51">3. <text:s/>left child = A[2i]</text:span><text:span text:style-name="T40"/></text:p>
          </table:table-cell>
        </table:table-row>
        <table:table-row table:style-name="表格56.1">
          <table:table-cell table:style-name="表格56.A1" office:value-type="string">
            <text:p text:style-name="P2" loext:marker-style-name="T40"><text:span text:style-name="T51">4. <text:s/>right child = A[2i+1]</text:span><text:span text:style-name="T40"/></text:p>
          </table:table-cell>
        </table:table-row>
        <table:table-row table:style-name="表格56.1">
          <table:table-cell table:style-name="表格56.A1" office:value-type="string">
            <text:p text:style-name="P2" loext:marker-style-name="T40"><text:span text:style-name="T51">5. <text:s/>Insert → Bubble Up → O(log n)</text:span><text:span text:style-name="T40"/></text:p>
          </table:table-cell>
        </table:table-row>
        <table:table-row table:style-name="表格56.1">
          <table:table-cell table:style-name="表格56.A1" office:value-type="string">
            <text:p text:style-name="P2" loext:marker-style-name="T40"><text:span text:style-name="T51">6. <text:s/>Delete/Extract → Heapify</text:span><text:span text:style-name="T58">（</text:span><text:span text:style-name="T51">Bubble Down</text:span><text:span text:style-name="T58">）→ </text:span><text:span text:style-name="T51">O(log n)</text:span></text:p>
          </table:table-cell>
        </table:table-row>
        <table:table-row table:style-name="表格56.1">
          <table:table-cell table:style-name="表格56.A1" office:value-type="string">
            <text:p text:style-name="P2" loext:marker-style-name="T40"><text:span text:style-name="T51">7. <text:s/>Build Heap</text:span><text:span text:style-name="T58">（</text:span><text:span text:style-name="T51">Bottom-Up</text:span><text:span text:style-name="T58">）</text:span><text:span text:style-name="T51">= O(n) <text:s/>★ </text:span><text:span text:style-name="T58">非 </text:span><text:span text:style-name="T51">O(n log n)</text:span></text:p>
          </table:table-cell>
        </table:table-row>
        <table:table-row table:style-name="表格56.1">
          <table:table-cell table:style-name="表格56.A1" office:value-type="string">
            <text:p text:style-name="P2" loext:marker-style-name="T40"><text:span text:style-name="T51">8. <text:s/>Heap Sort = O(n log n)</text:span><text:span text:style-name="T58">，</text:span><text:span text:style-name="T51">In-place</text:span><text:span text:style-name="T58">，</text:span><text:span text:style-name="T51">Unstable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  <style:font-face style:name="Wingdings 21" svg:font-family="'Wingdings 2'" style:font-adornments="Regular" style:font-family-generic="roman" style:font-pitch="variable" style:font-charset="x-symbol"/>
    <style:font-face style:name="Wingdings1" svg:font-family="Wingdings" style:font-adornments="Regular" style:font-pitch="variable" style:font-charset="x-symbol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595959" loext:opacity="100%" style:font-name="Arial1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595959" loext:opacity="100%" style:font-name="Arial1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fo:color="#595959" loext:opacity="100%" style:font-name="Arial1" fo:font-family="Arial" style:font-family-generic="swiss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529cm" fo:margin-bottom="0.212cm" style:contextual-spacing="false"/>
      <style:text-properties fo:color="#1f4e79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23cm" fo:margin-bottom="0.141cm" style:contextual-spacing="false"/>
      <style:text-properties fo:color="#2e75b6" loext:opacity="100%"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fo:color="#595959" loext:opacity="100%" style:font-name="Arial1" fo:font-family="Arial" style:font-family-generic="swiss" style:font-pitch="variable" fo:font-size="11pt" fo:language="en" fo:country="US" fo:font-weight="bold" style:letter-kerning="false" style:font-name-asian="Arial2" style:font-family-asian="Arial" style:font-family-generic-asian="system" style:font-pitch-asian="variable" style:font-size-asian="11pt" style:language-asian="zh" style:country-asian="TW" style:font-weight-asian="bold" style:font-name-complex="Arial2" style:font-family-complex="Arial" style:font-family-generic-complex="system" style:font-pitch-complex="variable" style:font-size-complex="11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fo:color="#595959" loext:opacity="100%" style:font-name="Arial1" fo:font-family="Arial" style:font-family-generic="swiss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Wingdings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-complex="Wingdings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Wingdings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complex="Wingdings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Wingdings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complex="Wingdings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-complex="Wingdings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complex="Wingdings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-complex="Wingdings" style:font-family-complex="Wingdings" style:font-family-generic-complex="system" style:font-pitch-complex="variable"/>
    </style:style>
    <style:style style:name="ListLabel_20_110" style:display-name="ListLabel 110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-complex="Wingdings" style:font-family-complex="Wingdings" style:font-family-generic-complex="system" style:font-pitch-complex="variable"/>
    </style:style>
    <style:style style:name="ListLabel_20_119" style:display-name="ListLabel 119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20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29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38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47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56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65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74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83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92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01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10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19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129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03T00:14:26</meta:creation-date>
    <meta:initial-creator>Un-named</meta:initial-creator>
    <dc:language>en-US</dc:language>
    <dc:date>2026-06-24T08:32:31.209000000</dc:date>
    <meta:editing-cycles>170</meta:editing-cycles>
    <meta:editing-duration>PT14H24M26S</meta:editing-duration>
    <meta:generator>MODA_ODF_Application_Tools/3.8.4.2$Windows_X86_64 LibreOffice_project/4fb77107d5af14329e08085efe4fa19b5633383a</meta:generator>
    <meta:document-statistic meta:table-count="56" meta:image-count="0" meta:object-count="0" meta:page-count="30" meta:paragraph-count="822" meta:word-count="7413" meta:character-count="19655" meta:non-whitespace-character-count="12935"/>
    <meta:user-defined meta:name="AppVersion">15.0000</meta:user-defined>
  </office:meta>
</office:document-meta>
</file>