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71cm" fo:margin-top="0cm" fo:margin-bottom="0cm" table:align="left" style:writing-mode="page"/>
    </style:style>
    <style:style style:name="表格45.A" style:family="table-column">
      <style:table-column-properties style:column-width="15.92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8" style:family="table">
      <style:table-properties style:width="15.921cm" fo:margin-left="0.071cm" fo:margin-top="0cm" fo:margin-bottom="0cm" table:align="left" style:writing-mode="page"/>
    </style:style>
    <style:style style:name="表格48.A" style:family="table-column">
      <style:table-column-properties style:column-width="15.92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Standard">
      <style:paragraph-properties fo:margin-top="0.053cm" fo:margin-bottom="0.053cm" style:contextual-spacing="false"/>
    </style:style>
    <style:style style:name="P3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4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5" style:family="paragraph" style:parent-style-name="Standard">
      <style:paragraph-properties fo:margin-top="0cm" fo:margin-bottom="0.212cm" style:contextual-spacing="false"/>
    </style:style>
    <style:style style:name="P6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7" style:family="paragraph" style:parent-style-name="Standard">
      <style:paragraph-properties fo:margin-top="0cm" fo:margin-bottom="0.141cm" style:contextual-spacing="false"/>
    </style:style>
    <style:style style:name="P8" style:family="paragraph" style:parent-style-name="Standard">
      <style:paragraph-properties fo:margin-top="0cm" fo:margin-bottom="0.282cm" style:contextual-spacing="false"/>
    </style:style>
    <style:style style:name="P9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0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1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12" style:family="paragraph" style:parent-style-name="Standard">
      <style:paragraph-properties fo:margin-top="0cm" fo:margin-bottom="0.071cm" style:contextual-spacing="false"/>
    </style:style>
    <style:style style:name="P13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14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15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P16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17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18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19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20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21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22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23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24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25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26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27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28" style:family="paragraph" style:parent-style-name="List_20_Paragraph" style:list-style-name="WWNum14">
      <style:paragraph-properties fo:margin-top="0cm" fo:margin-bottom="0.141cm" style:contextual-spacing="false"/>
    </style:style>
    <style:style style:name="P29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30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margin-top="0.106cm" fo:margin-bottom="0.106cm" style:contextual-spacing="false"/>
    </style:style>
    <style:style style:name="P33" style:family="paragraph" style:parent-style-name="Standard">
      <style:paragraph-properties fo:margin-top="0.053cm" fo:margin-bottom="0.053cm" style:contextual-spacing="false"/>
    </style:style>
    <style:style style:name="P34" style:family="paragraph" style:parent-style-name="Standard">
      <style:paragraph-properties fo:margin-top="0.318cm" fo:margin-bottom="0.106cm" style:contextual-spacing="false"/>
    </style:style>
    <style:style style:name="P35" style:family="paragraph" style:parent-style-name="Standard" style:list-style-name="WWNum2">
      <style:paragraph-properties fo:margin-top="0.071cm" fo:margin-bottom="0.071cm" style:contextual-spacing="false"/>
    </style:style>
    <style:style style:name="P36" style:family="paragraph" style:parent-style-name="Standard">
      <style:paragraph-properties fo:margin-top="0cm" fo:margin-bottom="0.212cm" style:contextual-spacing="false"/>
    </style:style>
    <style:style style:name="P37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38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39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40" style:family="paragraph" style:parent-style-name="Standard">
      <style:paragraph-properties fo:margin-top="0cm" fo:margin-bottom="0.141cm" style:contextual-spacing="false"/>
    </style:style>
    <style:style style:name="P41" style:family="paragraph" style:parent-style-name="Standard">
      <style:paragraph-properties fo:margin-top="0cm" fo:margin-bottom="0cm" style:contextual-spacing="false"/>
    </style:style>
    <style:style style:name="P42" style:family="paragraph" style:parent-style-name="Standard">
      <style:paragraph-properties fo:margin-top="0.353cm" fo:margin-bottom="0.176cm" style:contextual-spacing="false"/>
    </style:style>
    <style:style style:name="P43" style:family="paragraph" style:parent-style-name="Standard">
      <style:paragraph-properties fo:margin-top="0.053cm" fo:margin-bottom="0.053cm" style:contextual-spacing="false"/>
      <style:text-properties officeooo:paragraph-rsid="00542c65"/>
    </style:style>
    <style:style style:name="P44" style:family="paragraph" style:parent-style-name="Standard">
      <style:paragraph-properties fo:margin-top="0.053cm" fo:margin-bottom="0.053cm" style:contextual-spacing="false"/>
      <style:text-properties officeooo:paragraph-rsid="00554de0"/>
    </style:style>
    <style:style style:name="P45" style:family="paragraph" style:parent-style-name="Standard">
      <style:paragraph-properties fo:margin-top="0.053cm" fo:margin-bottom="0.053cm" style:contextual-spacing="false"/>
      <style:text-properties officeooo:paragraph-rsid="005ccf35"/>
    </style:style>
    <style:style style:name="P46" style:family="paragraph" style:parent-style-name="Standard">
      <style:paragraph-properties fo:margin-top="0.106cm" fo:margin-bottom="0.106cm" style:contextual-spacing="false"/>
      <style:text-properties officeooo:paragraph-rsid="00661972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5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6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7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9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1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12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4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6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17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8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20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21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22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23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24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25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6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27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8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9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30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31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32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33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34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35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36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37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8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9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40" style:family="text">
      <style:text-properties fo:color="#595959" loext:opacity="100%" style:font-name="Arial1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41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42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43" style:family="text">
      <style:text-properties fo:color="#595959" loext:opacity="100%" style:font-name="Arial1" fo:font-size="10.5pt" fo:background-color="#4a148c" loext:char-shading-value="0" style:font-size-asian="10.5pt" style:font-name-complex="Arial2" style:font-size-complex="10.5pt"/>
    </style:style>
    <style:style style:name="T44" style:family="text">
      <style:text-properties fo:color="#595959" loext:opacity="100%" style:font-name="Arial1" fo:font-size="10.5pt" fo:background-color="#4a148c" loext:char-shading-value="0" style:font-size-asian="10.5pt" style:font-name-complex="Arial2" style:font-size-complex="10.5pt"/>
    </style:style>
    <style:style style:name="T45" style:family="text">
      <style:text-properties fo:color="#595959" loext:opacity="100%" style:font-name="Arial1" fo:font-size="10.5pt" fo:background-color="#311b92" loext:char-shading-value="0" style:font-size-asian="10.5pt" style:font-name-complex="Arial2" style:font-size-complex="10.5pt"/>
    </style:style>
    <style:style style:name="T46" style:family="text">
      <style:text-properties fo:color="#595959" loext:opacity="100%" style:font-name="Arial1" fo:font-size="10.5pt" fo:background-color="#311b92" loext:char-shading-value="0" style:font-size-asian="10.5pt" style:font-name-complex="Arial2" style:font-size-complex="10.5pt"/>
    </style:style>
    <style:style style:name="T47" style:family="text">
      <style:text-properties fo:color="#595959" loext:opacity="100%" style:font-name="Arial1" fo:font-size="10.5pt" fo:background-color="#1b5e20" loext:char-shading-value="0" style:font-size-asian="10.5pt" style:font-name-complex="Arial2" style:font-size-complex="10.5pt"/>
    </style:style>
    <style:style style:name="T48" style:family="text">
      <style:text-properties fo:color="#595959" loext:opacity="100%" style:font-name="Arial1" fo:font-size="10.5pt" fo:background-color="#1b5e20" loext:char-shading-value="0" style:font-size-asian="10.5pt" style:font-name-complex="Arial2" style:font-size-complex="10.5pt"/>
    </style:style>
    <style:style style:name="T49" style:family="text">
      <style:text-properties fo:color="#595959" loext:opacity="100%" style:font-name="Arial1" fo:font-size="10.5pt" fo:background-color="#ffd740" loext:char-shading-value="0" style:font-size-asian="10.5pt" style:font-name-complex="Arial2" style:font-size-complex="10.5pt"/>
    </style:style>
    <style:style style:name="T50" style:family="text">
      <style:text-properties fo:color="#595959" loext:opacity="100%" style:font-name="Arial1" fo:font-size="10.5pt" fo:background-color="#ffd740" loext:char-shading-value="0" style:font-size-asian="10.5pt" style:font-name-complex="Arial2" style:font-size-complex="10.5pt"/>
    </style:style>
    <style:style style:name="T51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52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53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54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55" style:family="text">
      <style:text-properties fo:color="#595959" loext:opacity="100%" fo:font-size="11pt" style:font-size-asian="11pt" style:font-name-complex="Arial2" style:font-size-complex="11pt"/>
    </style:style>
    <style:style style:name="T56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57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58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59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60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61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62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63" style:family="text">
      <style:text-properties fo:color="#595959" loext:opacity="100%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64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65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66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67" style:family="text">
      <style:text-properties fo:color="#595959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68" style:family="text">
      <style:text-properties fo:color="#595959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69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70" style:family="text">
      <style:text-properties fo:color="#595959" loext:opacity="100%" fo:font-size="10.5pt" style:font-size-asian="10.5pt" style:font-name-complex="Arial2" style:font-size-complex="10.5pt"/>
    </style:style>
    <style:style style:name="T71" style:family="text">
      <style:text-properties fo:color="#595959" loext:opacity="100%" fo:font-size="10.5pt" fo:background-color="#1b5e20" loext:char-shading-value="0" style:font-name-asian="Arial2" style:font-size-asian="10.5pt" style:font-name-complex="Arial2" style:font-size-complex="10.5pt"/>
    </style:style>
    <style:style style:name="T72" style:family="text">
      <style:text-properties fo:color="#595959" loext:opacity="100%" fo:font-size="10.5pt" fo:background-color="#1b5e20" loext:char-shading-value="0" style:font-name-asian="Arial2" style:font-size-asian="10.5pt" style:font-name-complex="Arial2" style:font-size-complex="10.5pt"/>
    </style:style>
    <style:style style:name="T73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74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75" style:family="text">
      <style:text-properties fo:color="#595959" loext:opacity="100%" fo:font-size="10.5pt" fo:background-color="#e65100" loext:char-shading-value="0" style:font-name-asian="Arial2" style:font-size-asian="10.5pt" style:font-name-complex="Arial2" style:font-size-complex="10.5pt"/>
    </style:style>
    <style:style style:name="T76" style:family="text">
      <style:text-properties fo:color="#595959" loext:opacity="100%" fo:font-size="10.5pt" fo:background-color="#e65100" loext:char-shading-value="0" style:font-name-asian="Arial2" style:font-size-asian="10.5pt" style:font-name-complex="Arial2" style:font-size-complex="10.5pt"/>
    </style:style>
    <style:style style:name="T77" style:family="text">
      <style:text-properties fo:color="#595959" loext:opacity="100%" fo:font-size="10.5pt" fo:background-color="#4a148c" loext:char-shading-value="0" style:font-name-asian="Arial2" style:font-size-asian="10.5pt" style:font-name-complex="Arial2" style:font-size-complex="10.5pt"/>
    </style:style>
    <style:style style:name="T78" style:family="text">
      <style:text-properties fo:color="#595959" loext:opacity="100%" fo:font-size="10.5pt" fo:background-color="#4a148c" loext:char-shading-value="0" style:font-name-asian="Arial2" style:font-size-asian="10.5pt" style:font-name-complex="Arial2" style:font-size-complex="10.5pt"/>
    </style:style>
    <style:style style:name="T79" style:family="text">
      <style:text-properties fo:color="#595959" loext:opacity="100%" fo:font-size="10.5pt" fo:background-color="#311b92" loext:char-shading-value="0" style:font-name-asian="Arial2" style:font-size-asian="10.5pt" style:font-name-complex="Arial2" style:font-size-complex="10.5pt"/>
    </style:style>
    <style:style style:name="T80" style:family="text">
      <style:text-properties fo:color="#595959" loext:opacity="100%" fo:font-size="10.5pt" fo:background-color="#311b92" loext:char-shading-value="0" style:font-name-asian="Arial2" style:font-size-asian="10.5pt" style:font-name-complex="Arial2" style:font-size-complex="10.5pt"/>
    </style:style>
    <style:style style:name="T81" style:family="text">
      <style:text-properties fo:color="#595959" loext:opacity="100%" fo:font-size="10.5pt" fo:background-color="#ffd740" loext:char-shading-value="0" style:font-name-asian="Arial2" style:font-size-asian="10.5pt" style:font-name-complex="Arial2" style:font-size-complex="10.5pt"/>
    </style:style>
    <style:style style:name="T82" style:family="text">
      <style:text-properties fo:color="#595959" loext:opacity="100%" fo:font-size="10.5pt" fo:background-color="#ffd740" loext:char-shading-value="0" style:font-name-asian="Arial2" style:font-size-asian="10.5pt" style:font-name-complex="Arial2" style:font-size-complex="10.5pt"/>
    </style:style>
    <style:style style:name="T83" style:family="text">
      <style:text-properties fo:color="#595959" loext:opacity="100%" fo:font-size="10.5pt" fo:background-color="#880e4f" loext:char-shading-value="0" style:font-name-asian="Arial2" style:font-size-asian="10.5pt" style:font-name-complex="Arial2" style:font-size-complex="10.5pt"/>
    </style:style>
    <style:style style:name="T84" style:family="text">
      <style:text-properties fo:color="#595959" loext:opacity="100%" fo:font-size="10.5pt" fo:background-color="#880e4f" loext:char-shading-value="0" style:font-name-asian="Arial2" style:font-size-asian="10.5pt" style:font-name-complex="Arial2" style:font-size-complex="10.5pt"/>
    </style:style>
    <style:style style:name="T85" style:family="text">
      <style:text-properties fo:color="#595959" loext:opacity="100%" fo:font-size="10.5pt" fo:background-color="#880e4f" loext:char-shading-value="0" style:font-size-asian="10.5pt" style:font-name-complex="Arial2" style:font-size-complex="10.5pt"/>
    </style:style>
    <style:style style:name="T86" style:family="text">
      <style:text-properties fo:color="#595959" loext:opacity="100%" fo:font-size="10.5pt" fo:background-color="#880e4f" loext:char-shading-value="0" style:font-size-asian="10.5pt" style:font-name-complex="Arial2" style:font-size-complex="10.5pt"/>
    </style:style>
    <style:style style:name="T87" style:family="text">
      <style:text-properties fo:color="#595959" loext:opacity="100%" fo:font-size="10.5pt" fo:background-color="#76ff03" loext:char-shading-value="0" style:font-name-asian="Arial2" style:font-size-asian="10.5pt" style:font-name-complex="Arial2" style:font-size-complex="10.5pt"/>
    </style:style>
    <style:style style:name="T88" style:family="text">
      <style:text-properties fo:color="#595959" loext:opacity="100%" fo:font-size="10.5pt" fo:background-color="#76ff03" loext:char-shading-value="0" style:font-name-asian="Arial2" style:font-size-asian="10.5pt" style:font-name-complex="Arial2" style:font-size-complex="10.5pt"/>
    </style:style>
    <style:style style:name="T89" style:family="text">
      <style:text-properties fo:color="#595959" loext:opacity="100%" fo:font-size="10.5pt" fo:background-color="#76ff03" loext:char-shading-value="0" style:font-size-asian="10.5pt" style:font-name-complex="Arial2" style:font-size-complex="10.5pt"/>
    </style:style>
    <style:style style:name="T90" style:family="text">
      <style:text-properties fo:color="#595959" loext:opacity="100%" fo:font-size="10.5pt" fo:background-color="#76ff03" loext:char-shading-value="0" style:font-size-asian="10.5pt" style:font-name-complex="Arial2" style:font-size-complex="10.5pt"/>
    </style:style>
    <style:style style:name="T91" style:family="text">
      <style:text-properties fo:color="#595959" loext:opacity="100%" fo:font-size="10.5pt" fo:background-color="#64ffda" loext:char-shading-value="0" style:font-name-asian="Arial2" style:font-size-asian="10.5pt" style:font-name-complex="Arial2" style:font-size-complex="10.5pt"/>
    </style:style>
    <style:style style:name="T92" style:family="text">
      <style:text-properties fo:color="#595959" loext:opacity="100%" fo:font-size="10.5pt" fo:background-color="#64ffda" loext:char-shading-value="0" style:font-name-asian="Arial2" style:font-size-asian="10.5pt" style:font-name-complex="Arial2" style:font-size-complex="10.5pt"/>
    </style:style>
    <style:style style:name="T93" style:family="text">
      <style:text-properties fo:color="#595959" loext:opacity="100%" fo:font-size="10.5pt" fo:background-color="#64ffda" loext:char-shading-value="0" style:font-size-asian="10.5pt" style:font-name-complex="Arial2" style:font-size-complex="10.5pt"/>
    </style:style>
    <style:style style:name="T94" style:family="text">
      <style:text-properties fo:color="#595959" loext:opacity="100%" fo:font-size="10.5pt" fo:background-color="#64ffda" loext:char-shading-value="0" style:font-size-asian="10.5pt" style:font-name-complex="Arial2" style:font-size-complex="10.5pt"/>
    </style:style>
    <style:style style:name="T95" style:family="text">
      <style:text-properties fo:color="#595959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96" style:family="text">
      <style:text-properties fo:color="#595959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97" style:family="text">
      <style:text-properties fo:color="#595959" loext:opacity="100%" fo:font-size="10.5pt" fo:background-color="#ffff00" loext:char-shading-value="0" style:font-size-asian="10.5pt" style:font-name-complex="Arial2" style:font-size-complex="10.5pt"/>
    </style:style>
    <style:style style:name="T98" style:family="text">
      <style:text-properties fo:color="#595959" loext:opacity="100%" fo:font-size="10.5pt" fo:background-color="#ffff00" loext:char-shading-value="0" style:font-size-asian="10.5pt" style:font-name-complex="Arial2" style:font-size-complex="10.5pt"/>
    </style:style>
    <style:style style:name="T99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00" style:family="text">
      <style:text-properties fo:color="#00e676" loext:opacity="100%" style:font-name="Arial1" fo:font-size="28pt" fo:font-weight="bold" fo:background-color="#d500f9" loext:char-shading-value="0" style:font-size-asian="28pt" style:font-weight-asian="bold" style:font-name-complex="Arial2" style:font-size-complex="28pt" style:font-weight-complex="bold"/>
    </style:style>
    <style:style style:name="T101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2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03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04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05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106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07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08" style:family="text">
      <style:text-properties fo:color="#00e676" loext:opacity="100%" fo:font-size="28pt" fo:font-weight="bold" fo:background-color="#d500f9" loext:char-shading-value="0" style:font-name-asian="Arial2" style:font-size-asian="28pt" style:font-weight-asian="bold" style:font-name-complex="Arial2" style:font-size-complex="28pt" style:font-weight-complex="bold"/>
    </style:style>
    <style:style style:name="T109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10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11" style:family="text">
      <style:text-properties fo:color="#00e67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12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113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14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15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16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117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118" style:family="text">
      <style:text-properties fo:color="#18ffff" loext:opacity="100%" style:font-name="Arial1" fo:font-size="10.5pt" style:font-size-asian="10.5pt" style:font-name-complex="Arial2" style:font-size-complex="10.5pt"/>
    </style:style>
    <style:style style:name="T119" style:family="text">
      <style:text-properties fo:color="#18ffff" loext:opacity="100%" style:font-name="Arial1" fo:font-size="10.5pt" fo:background-color="#d500f9" loext:char-shading-value="0" style:font-size-asian="10.5pt" style:font-name-complex="Arial2" style:font-size-complex="10.5pt"/>
    </style:style>
    <style:style style:name="T120" style:family="text">
      <style:text-properties fo:color="#18ffff" loext:opacity="100%" style:font-name="Arial1" fo:font-size="10.5pt" fo:background-color="#d500f9" loext:char-shading-value="0" style:font-size-asian="10.5pt" style:font-name-complex="Arial2" style:font-size-complex="10.5pt"/>
    </style:style>
    <style:style style:name="T121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122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23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124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125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126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127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128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29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30" style:family="text">
      <style:text-properties fo:color="#18ffff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131" style:family="text">
      <style:text-properties fo:color="#18ffff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132" style:family="text">
      <style:text-properties fo:color="#18ffff" loext:opacity="100%" fo:font-size="10.5pt" style:font-name-asian="Arial2" style:font-size-asian="10.5pt" style:font-name-complex="Arial2" style:font-size-complex="10.5pt"/>
    </style:style>
    <style:style style:name="T133" style:family="text">
      <style:text-properties fo:color="#18ffff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134" style:family="text">
      <style:text-properties fo:color="#18ffff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135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36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37" style:family="text">
      <style:text-properties fo:color="#18ffff" loext:opacity="100%" fo:font-size="11pt" fo:font-weight="bold" fo:background-color="#1b5e20" loext:char-shading-value="0" style:font-size-asian="11pt" style:font-weight-asian="bold" style:font-name-complex="Arial2" style:font-size-complex="11pt" style:font-weight-complex="bold"/>
    </style:style>
    <style:style style:name="T138" style:family="text">
      <style:text-properties fo:color="#18ffff" loext:opacity="100%" fo:font-size="11pt" fo:font-weight="bold" fo:background-color="#1b5e20" loext:char-shading-value="0" style:font-size-asian="11pt" style:font-weight-asian="bold" style:font-name-complex="Arial2" style:font-size-complex="11pt" style:font-weight-complex="bold"/>
    </style:style>
    <style:style style:name="T139" style:family="text">
      <style:text-properties fo:color="#18ffff" loext:opacity="100%" fo:font-size="11pt" fo:font-weight="bold" fo:background-color="#004d40" loext:char-shading-value="0" style:font-size-asian="11pt" style:font-weight-asian="bold" style:font-name-complex="Arial2" style:font-size-complex="11pt" style:font-weight-complex="bold"/>
    </style:style>
    <style:style style:name="T140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141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142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43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144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45" style:family="text">
      <style:text-properties fo:color="#76ff03" loext:opacity="100%" fo:font-size="10.5pt" fo:font-weight="bold" fo:background-color="#1b5e20" loext:char-shading-value="0" style:font-name-asian="Arial2" style:font-size-asian="10.5pt" style:font-weight-asian="bold" style:font-name-complex="Arial2" style:font-size-complex="10.5pt" style:font-weight-complex="bold"/>
    </style:style>
    <style:style style:name="T146" style:family="text">
      <style:text-properties fo:color="#76ff03" loext:opacity="100%" fo:font-size="10.5pt" fo:background-color="#1b5e20" loext:char-shading-value="0" style:font-name-asian="Arial2" style:font-size-asian="10.5pt" style:font-name-complex="Arial2" style:font-size-complex="10.5pt"/>
    </style:style>
    <style:style style:name="T147" style:family="text">
      <style:text-properties fo:color="#76ff03" loext:opacity="100%" fo:font-size="10.5pt" fo:background-color="#1b5e20" loext:char-shading-value="0" style:font-name-asian="Arial2" style:font-size-asian="10.5pt" style:font-name-complex="Arial2" style:font-size-complex="10.5pt"/>
    </style:style>
    <style:style style:name="T148" style:family="text">
      <style:text-properties fo:color="#76ff03" loext:opacity="100%" fo:font-size="10.5pt" style:font-name-asian="Arial2" style:font-size-asian="10.5pt" style:font-name-complex="Arial2" style:font-size-complex="10.5pt"/>
    </style:style>
    <style:style style:name="T149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50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51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52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53" style:family="text">
      <style:text-properties fo:color="#76ff03" loext:opacity="100%" style:font-name="Arial1" fo:font-size="10.5pt" fo:background-color="#1b5e20" loext:char-shading-value="0" style:font-size-asian="10.5pt" style:font-name-complex="Arial2" style:font-size-complex="10.5pt"/>
    </style:style>
    <style:style style:name="T154" style:family="text">
      <style:text-properties fo:color="#76ff03" loext:opacity="100%" style:font-name="Arial1" fo:font-size="10.5pt" fo:background-color="#1b5e20" loext:char-shading-value="0" style:font-size-asian="10.5pt" style:font-name-complex="Arial2" style:font-size-complex="10.5pt"/>
    </style:style>
    <style:style style:name="T155" style:family="text">
      <style:text-properties fo:color="#76ff03" loext:opacity="100%" style:font-name="Arial1" fo:font-size="10.5pt" fo:font-weight="bold" fo:background-color="#1b5e20" loext:char-shading-value="0" style:font-size-asian="10.5pt" style:font-weight-asian="bold" style:font-name-complex="Arial2" style:font-size-complex="10.5pt" style:font-weight-complex="bold"/>
    </style:style>
    <style:style style:name="T156" style:family="text">
      <style:text-properties fo:color="#76ff03" loext:opacity="100%" style:font-name="Arial1" fo:font-size="10.5pt" style:font-size-asian="10.5pt" style:font-name-complex="Arial2" style:font-size-complex="10.5pt"/>
    </style:style>
    <style:style style:name="T157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58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59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60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61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62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63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64" style:family="text">
      <style:text-properties fo:color="#ff1744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65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166" style:family="text">
      <style:text-properties fo:color="#64ffda" loext:opacity="100%" fo:font-size="11pt" fo:font-weight="bold" fo:background-color="#004d40" loext:char-shading-value="0" style:font-size-asian="11pt" style:font-weight-asian="bold" style:font-name-complex="Arial2" style:font-size-complex="11pt" style:font-weight-complex="bold"/>
    </style:style>
    <style:style style:name="T167" style:family="text">
      <style:text-properties fo:color="#64ffda" loext:opacity="100%" fo:font-size="11pt" fo:font-weight="bold" fo:background-color="#e65100" loext:char-shading-value="0" style:font-size-asian="11pt" style:font-weight-asian="bold" style:font-name-complex="Arial2" style:font-size-complex="11pt" style:font-weight-complex="bold"/>
    </style:style>
    <style:style style:name="T168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69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70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71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72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73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74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75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76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77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78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79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180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181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82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83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4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85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86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87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88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89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90" style:family="text">
      <style:text-properties fo:color="#ff4081" loext:opacity="100%" fo:font-size="10.5pt" fo:font-weight="bold" fo:background-color="#880e4f" loext:char-shading-value="0" style:font-name-asian="Arial2" style:font-size-asian="10.5pt" style:font-weight-asian="bold" style:font-name-complex="Arial2" style:font-size-complex="10.5pt" style:font-weight-complex="bold"/>
    </style:style>
    <style:style style:name="T191" style:family="text">
      <style:text-properties fo:color="#ff4081" loext:opacity="100%" fo:font-size="10.5pt" fo:font-weight="bold" fo:background-color="#880e4f" loext:char-shading-value="0" style:font-size-asian="10.5pt" style:font-weight-asian="bold" style:font-name-complex="Arial2" style:font-size-complex="10.5pt" style:font-weight-complex="bold"/>
    </style:style>
    <style:style style:name="T192" style:family="text">
      <style:text-properties fo:color="#ff4081" loext:opacity="100%" fo:font-size="10.5pt" fo:font-weight="bold" fo:background-color="#f48fb1" loext:char-shading-value="0" style:font-name-asian="Arial2" style:font-size-asian="10.5pt" style:font-weight-asian="bold" style:font-name-complex="Arial2" style:font-size-complex="10.5pt" style:font-weight-complex="bold"/>
    </style:style>
    <style:style style:name="T193" style:family="text">
      <style:text-properties fo:color="#ff4081" loext:opacity="100%" fo:font-size="10.5pt" fo:font-weight="bold" fo:background-color="#f48fb1" loext:char-shading-value="0" style:font-size-asian="10.5pt" style:font-weight-asian="bold" style:font-name-complex="Arial2" style:font-size-complex="10.5pt" style:font-weight-complex="bold"/>
    </style:style>
    <style:style style:name="T194" style:family="text">
      <style:text-properties fo:color="#ff4081" loext:opacity="100%" fo:font-size="10.5pt" fo:font-weight="bold" fo:background-color="#fce4ec" loext:char-shading-value="0" style:font-name-asian="Arial2" style:font-size-asian="10.5pt" style:font-weight-asian="bold" style:font-name-complex="Arial2" style:font-size-complex="10.5pt" style:font-weight-complex="bold"/>
    </style:style>
    <style:style style:name="T195" style:family="text">
      <style:text-properties fo:color="#ff4081" loext:opacity="100%" fo:font-size="10.5pt" fo:font-weight="bold" fo:background-color="#fce4ec" loext:char-shading-value="0" style:font-size-asian="10.5pt" style:font-weight-asian="bold" style:font-name-complex="Arial2" style:font-size-complex="10.5pt" style:font-weight-complex="bold"/>
    </style:style>
    <style:style style:name="T196" style:family="text">
      <style:text-properties fo:color="#ff4081" loext:opacity="100%" fo:font-size="10.5pt" fo:font-weight="bold" fo:background-color="#ffee58" loext:char-shading-value="0" style:font-name-asian="Arial2" style:font-size-asian="10.5pt" style:font-weight-asian="bold" style:font-name-complex="Arial2" style:font-size-complex="10.5pt" style:font-weight-complex="bold"/>
    </style:style>
    <style:style style:name="T197" style:family="text">
      <style:text-properties fo:color="#ff4081" loext:opacity="100%" fo:font-size="10.5pt" fo:font-weight="bold" fo:background-color="#ffee58" loext:char-shading-value="0" style:font-size-asian="10.5pt" style:font-weight-asian="bold" style:font-name-complex="Arial2" style:font-size-complex="10.5pt" style:font-weight-complex="bold"/>
    </style:style>
    <style:style style:name="T198" style:family="text">
      <style:text-properties fo:color="#ff4081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99" style:family="text">
      <style:text-properties fo:color="#ff4081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200" style:family="text">
      <style:text-properties fo:color="#ff4081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201" style:family="text">
      <style:text-properties fo:color="#ff4081" loext:opacity="100%" fo:font-size="10.5pt" fo:font-weight="bold" fo:background-color="#0d47a1" loext:char-shading-value="0" style:font-size-asian="10.5pt" style:font-weight-asian="bold" style:font-name-complex="Arial2" style:font-size-complex="10.5pt" style:font-weight-complex="bold"/>
    </style:style>
    <style:style style:name="T202" style:family="text">
      <style:text-properties fo:color="#ff4081" loext:opacity="100%" fo:font-size="10.5pt" style:font-name-asian="Arial2" style:font-size-asian="10.5pt" style:font-name-complex="Arial2" style:font-size-complex="10.5pt"/>
    </style:style>
    <style:style style:name="T203" style:family="text">
      <style:text-properties fo:color="#ff4081" loext:opacity="100%" fo:font-size="10.5pt" style:font-size-asian="10.5pt" style:font-name-complex="Arial2" style:font-size-complex="10.5pt"/>
    </style:style>
    <style:style style:name="T204" style:family="text">
      <style:text-properties fo:color="#ff4081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205" style:family="text">
      <style:text-properties fo:color="#ff4081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206" style:family="text">
      <style:text-properties fo:color="#ff4081" loext:opacity="100%" fo:font-size="10.5pt" fo:background-color="#0d47a1" loext:char-shading-value="0" style:font-size-asian="10.5pt" style:font-name-complex="Arial2" style:font-size-complex="10.5pt"/>
    </style:style>
    <style:style style:name="T207" style:family="text">
      <style:text-properties fo:color="#ff4081" loext:opacity="100%" fo:font-size="10.5pt" fo:background-color="#0d47a1" loext:char-shading-value="0" style:font-size-asian="10.5pt" style:font-name-complex="Arial2" style:font-size-complex="10.5pt"/>
    </style:style>
    <style:style style:name="T208" style:family="text">
      <style:text-properties fo:color="#ff4081" loext:opacity="100%" style:font-name="Courier New" fo:font-size="9.5pt" fo:font-weight="bold" fo:background-color="#0000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09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210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211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212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213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214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215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216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217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18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219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20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221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222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223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224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225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226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227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228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9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0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231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232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233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234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235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236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237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238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239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40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241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42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43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44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45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246" style:family="text">
      <style:text-properties fo:color="#1f3864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47" style:family="text">
      <style:text-properties fo:color="#1f3864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248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249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250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51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252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253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254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255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256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257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258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59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260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261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262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263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264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265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66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67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68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69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70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271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72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273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274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275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276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77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278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279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80" style:family="text">
      <style:text-properties fo:font-size="10.5pt" style:font-name-asian="Arial2" style:font-size-asian="10.5pt" style:font-name-complex="Arial2" style:font-size-complex="10.5pt"/>
    </style:style>
    <style:style style:name="T281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82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283" style:family="text">
      <style:text-properties fo:color="#ffea00" loext:opacity="100%" fo:font-size="10.5pt" fo:background-color="#e65100" loext:char-shading-value="0" style:font-name-asian="Arial2" style:font-size-asian="10.5pt" style:font-name-complex="Arial2" style:font-size-complex="10.5pt"/>
    </style:style>
    <style:style style:name="T284" style:family="text">
      <style:text-properties fo:color="#ffea00" loext:opacity="100%" fo:font-size="10.5pt" fo:font-weight="bold" fo:background-color="#e65100" loext:char-shading-value="0" style:font-name-asian="Arial2" style:font-size-asian="10.5pt" style:font-weight-asian="bold" style:font-name-complex="Arial2" style:font-size-complex="10.5pt" style:font-weight-complex="bold"/>
    </style:style>
    <style:style style:name="T285" style:family="text">
      <style:text-properties fo:color="#e1bee7" loext:opacity="100%" style:font-name="Arial1" fo:font-size="10.5pt" fo:background-color="#4a148c" loext:char-shading-value="0" style:font-size-asian="10.5pt" style:font-name-complex="Arial2" style:font-size-complex="10.5pt"/>
    </style:style>
    <style:style style:name="T286" style:family="text">
      <style:text-properties fo:color="#e1bee7" loext:opacity="100%" style:font-name="Arial1" fo:font-size="10.5pt" fo:font-weight="bold" fo:background-color="#4a148c" loext:char-shading-value="0" style:font-size-asian="10.5pt" style:font-weight-asian="bold" style:font-name-complex="Arial2" style:font-size-complex="10.5pt" style:font-weight-complex="bold"/>
    </style:style>
    <style:style style:name="T287" style:family="text">
      <style:text-properties fo:color="#e1bee7" loext:opacity="100%" fo:font-size="10.5pt" fo:background-color="#4a148c" loext:char-shading-value="0" style:font-name-asian="Arial2" style:font-size-asian="10.5pt" style:font-name-complex="Arial2" style:font-size-complex="10.5pt"/>
    </style:style>
    <style:style style:name="T288" style:family="text">
      <style:text-properties fo:color="#e1bee7" loext:opacity="100%" fo:font-size="10.5pt" fo:font-weight="bold" fo:background-color="#4a148c" loext:char-shading-value="0" style:font-name-asian="Arial2" style:font-size-asian="10.5pt" style:font-weight-asian="bold" style:font-name-complex="Arial2" style:font-size-complex="10.5pt" style:font-weight-complex="bold"/>
    </style:style>
    <style:style style:name="T289" style:family="text">
      <style:text-properties fo:color="#d1c4e9" loext:opacity="100%" fo:font-size="10.5pt" fo:background-color="#311b92" loext:char-shading-value="0" style:font-name-asian="Arial2" style:font-size-asian="10.5pt" style:font-name-complex="Arial2" style:font-size-complex="10.5pt"/>
    </style:style>
    <style:style style:name="T290" style:family="text">
      <style:text-properties fo:color="#d1c4e9" loext:opacity="100%" fo:font-size="10.5pt" fo:background-color="#311b92" loext:char-shading-value="0" style:font-name-asian="Arial2" style:font-size-asian="10.5pt" style:font-name-complex="Arial2" style:font-size-complex="10.5pt"/>
    </style:style>
    <style:style style:name="T291" style:family="text">
      <style:text-properties fo:color="#d1c4e9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292" style:family="text">
      <style:text-properties fo:color="#d1c4e9" loext:opacity="100%" fo:font-size="10.5pt" style:font-name-asian="Arial2" style:font-size-asian="10.5pt" style:font-name-complex="Arial2" style:font-size-complex="10.5pt"/>
    </style:style>
    <style:style style:name="T293" style:family="text">
      <style:text-properties fo:color="#d1c4e9" loext:opacity="100%" style:font-name="Arial1" fo:font-size="10.5pt" fo:background-color="#311b92" loext:char-shading-value="0" style:font-size-asian="10.5pt" style:font-name-complex="Arial2" style:font-size-complex="10.5pt"/>
    </style:style>
    <style:style style:name="T294" style:family="text">
      <style:text-properties fo:color="#d1c4e9" loext:opacity="100%" style:font-name="Arial1" fo:font-size="10.5pt" fo:background-color="#311b92" loext:char-shading-value="0" style:font-size-asian="10.5pt" style:font-name-complex="Arial2" style:font-size-complex="10.5pt"/>
    </style:style>
    <style:style style:name="T295" style:family="text">
      <style:text-properties fo:color="#d1c4e9" loext:opacity="100%" style:font-name="Arial1" fo:font-size="10.5pt" fo:font-weight="bold" fo:background-color="#311b92" loext:char-shading-value="0" style:font-size-asian="10.5pt" style:font-weight-asian="bold" style:font-name-complex="Arial2" style:font-size-complex="10.5pt" style:font-weight-complex="bold"/>
    </style:style>
    <style:style style:name="T296" style:family="text">
      <style:text-properties fo:color="#d1c4e9" loext:opacity="100%" style:font-name="Arial1" fo:font-size="10.5pt" style:font-size-asian="10.5pt" style:font-name-complex="Arial2" style:font-size-complex="10.5pt"/>
    </style:style>
    <style:style style:name="T297" style:family="text">
      <style:text-properties fo:color="#fff59d" loext:opacity="100%" fo:font-size="11pt" fo:font-weight="bold" fo:background-color="#e65100" loext:char-shading-value="0" style:font-size-asian="11pt" style:font-weight-asian="bold" style:font-name-complex="Arial2" style:font-size-complex="11pt" style:font-weight-complex="bold"/>
    </style:style>
    <style:style style:name="T298" style:family="text">
      <style:text-properties fo:color="#fff59d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299" style:family="text">
      <style:text-properties fo:color="#f8bbd0" loext:opacity="100%" fo:font-size="10.5pt" fo:background-color="#880e4f" loext:char-shading-value="0" style:font-name-asian="Arial2" style:font-size-asian="10.5pt" style:font-name-complex="Arial2" style:font-size-complex="10.5pt"/>
    </style:style>
    <style:style style:name="T300" style:family="text">
      <style:text-properties fo:color="#f8bbd0" loext:opacity="100%" fo:font-size="10.5pt" fo:background-color="#880e4f" loext:char-shading-value="0" style:font-size-asian="10.5pt" style:font-name-complex="Arial2" style:font-size-complex="10.5pt"/>
    </style:style>
    <style:style style:name="T301" style:family="text">
      <style:text-properties fo:color="#f8bbd0" loext:opacity="100%" fo:font-size="10.5pt" fo:font-weight="bold" fo:background-color="#880e4f" loext:char-shading-value="0" style:font-name-asian="Arial2" style:font-size-asian="10.5pt" style:font-weight-asian="bold" style:font-name-complex="Arial2" style:font-size-complex="10.5pt" style:font-weight-complex="bold"/>
    </style:style>
    <style:style style:name="T302" style:family="text">
      <style:text-properties fo:color="#f8bbd0" loext:opacity="100%" fo:font-size="10.5pt" fo:font-weight="bold" fo:background-color="#880e4f" loext:char-shading-value="0" style:font-size-asian="10.5pt" style:font-weight-asian="bold" style:font-name-complex="Arial2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 loext:marker-style-name="T1"><text:span text:style-name="T2">【</text:span><text:span text:style-name="T9">11</text:span><text:span text:style-name="T2">】堆積（</text:span><text:span text:style-name="T9">Heap</text:span><text:span text:style-name="T2">）＋優先佇列（</text:span><text:span text:style-name="T9">Priority Queue</text:span><text:span text:style-name="T2">）</text:span></text:p>
      <text:p text:style-name="P30" loext:marker-style-name="T15"><text:span text:style-name="T16">資訊類公職考試完整筆記 ● 考點：</text:span><text:span text:style-name="T24">110</text:span><text:span text:style-name="T16">地</text:span><text:span text:style-name="T24">Q4</text:span><text:span text:style-name="T16">、</text:span><text:span text:style-name="T24">111</text:span><text:span text:style-name="T16">地</text:span><text:span text:style-name="T24">Q4</text:span><text:span text:style-name="T16">、</text:span><text:span text:style-name="T24">113</text:span><text:span text:style-name="T16">地</text:span><text:span text:style-name="T24">Q3</text:span><text:span text:style-name="T16">、</text:span><text:span text:style-name="T24">114</text:span><text:span text:style-name="T16">地</text:span><text:span text:style-name="T24">Q2</text:span></text:p>
      <text:p text:style-name="P1"/>
      <text:h text:style-name="P13" text:outline-level="1" loext:marker-style-name="T3"><text:span text:style-name="T4">一、</text:span><text:span text:style-name="T10">Heap </text:span><text:span text:style-name="T4">的定義與兩大條件</text:span></text:h>
      <text:p text:style-name="P32" loext:marker-style-name="T27"><text:span text:style-name="T51">Heap</text:span><text:span text:style-name="T28">（堆積）是一種特殊的二元樹，必須同時滿足以下兩個條件，缺一不可：</text:span></text:p>
      <text:p text:style-name="P1"/>
      <text:h text:style-name="P16" text:outline-level="2" loext:marker-style-name="T17"><text:span text:style-name="T18">條件</text:span><text:span text:style-name="T25">1</text:span><text:span text:style-name="T18">：</text:span><text:span text:style-name="T25">Complete Binary Tree</text:span><text:span text:style-name="T18">（完全二元樹）</text:span></text:h>
      <text:list xml:id="list4253724859" text:style-name="WWNum5">
        <text:list-item text:start-value="1">
          <text:p text:style-name="P19" loext:marker-style-name="T33"><text:span text:style-name="T99">每一層節點都必須盡量填滿</text:span><text:span text:style-name="T34">。</text:span></text:p>
        </text:list-item>
        <text:list-item text:style-override="WWNum6">
          <text:p text:style-name="P20" loext:marker-style-name="T33"><text:span text:style-name="T35">最後一層</text:span><text:span text:style-name="T34">的節點必須</text:span><text:span text:style-name="T112">從左往右依序填入</text:span><text:span text:style-name="T34">，</text:span><text:span text:style-name="T115">不可跳過</text:span><text:span text:style-name="T34">。</text:span></text:p>
        </text:list-item>
      </text:list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 loext:marker-style-name="T41"><text:span text:style-name="T56">✅ </text:span><text:span text:style-name="T42">合法 </text:span><text:span text:style-name="T56">Complete Binary Tree</text:span><text:span text:style-name="T42">：</text:span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56"><text:s text:c="7"/>10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56"><text:s text:c="8"/>/ <text:s text:c="2"/>\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56"><text:s text:c="4"/>90 <text:s text:c="4"/>8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56"><text:s text:c="4"/>/ \ <text:s text:c="5"/>/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36"><text:span text:style-name="T57">70 <text:s/>60 50</text:span><text:span text:style-name="T36"/>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56">❌ </text:span><text:span text:style-name="T42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56"><text:s text:c="7"/>10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56"><text:s text:c="8"/>/ <text:s text:c="2"/>\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56"><text:s text:c="4"/>90 <text:s text:c="4"/>8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56"><text:s text:c="8"/>\ <text:s text:c="2"/>/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2" loext:marker-style-name="T41"><text:span text:style-name="T56"><text:s text:c="6"/></text:span><text:span text:style-name="T57">60 50</text:span></text:p>
          </table:table-cell>
        </table:table-row>
      </table:table>
      <text:p text:style-name="P1"/>
      <text:h text:style-name="P16" text:outline-level="2" loext:marker-style-name="T17"><text:span text:style-name="T18">條件</text:span><text:span text:style-name="T25">2</text:span><text:span text:style-name="T18">：</text:span><text:span text:style-name="T25">Heap Property</text:span><text:span text:style-name="T18">（堆積性質）</text:span></text:h>
      <text:p text:style-name="P32" loext:marker-style-name="T27"><text:span text:style-name="T28">父節點與子節點之間必須滿足固定的大小關係，分為兩種：</text:span><text:span text:style-name="T27"/>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31" loext:marker-style-name="T5"><text:span text:style-name="T6">類型</text:span><text:span text:style-name="T5"/></text:p>
            </table:table-cell>
            <table:table-cell table:style-name="表格2.A1" office:value-type="string">
              <text:p text:style-name="P31" loext:marker-style-name="T5"><text:span text:style-name="T6">規則</text:span><text:span text:style-name="T5"/></text:p>
            </table:table-cell>
            <table:table-cell table:style-name="表格2.A1" office:value-type="string">
              <text:p text:style-name="P31" loext:marker-style-name="T5"><text:span text:style-name="T6">範例</text:span><text:span text:style-name="T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31" loext:marker-style-name="T41"><text:span text:style-name="T142">Min</text:span><text:span text:style-name="T56"> Heap</text:span></text:p>
          </table:table-cell>
          <table:table-cell table:style-name="表格2.A2" office:value-type="string">
            <text:p text:style-name="P31" loext:marker-style-name="T41"><text:span text:style-name="T56">parent ≤ child</text:span><text:span text:style-name="T42">（</text:span><text:span text:style-name="T37">父小子大</text:span><text:span text:style-name="T42">）</text:span></text:p>
          </table:table-cell>
          <table:table-cell table:style-name="表格2.A2" office:value-type="string">
            <text:p text:style-name="P31" loext:marker-style-name="T41"><text:span text:style-name="T56">Root </text:span><text:span text:style-name="T42">必為最小值</text:span></text:p>
          </table:table-cell>
        </table:table-row>
        <table:table-row table:style-name="表格2.1">
          <table:table-cell table:style-name="表格2.A3" office:value-type="string">
            <text:p text:style-name="P31" loext:marker-style-name="T41"><text:span text:style-name="T157">Max</text:span><text:span text:style-name="T56"> Heap</text:span></text:p>
          </table:table-cell>
          <table:table-cell table:style-name="表格2.A3" office:value-type="string">
            <text:p text:style-name="P31" loext:marker-style-name="T41"><text:span text:style-name="T56">parent ≥ child</text:span><text:span text:style-name="T42">（</text:span><text:span text:style-name="T38">父大子小</text:span><text:span text:style-name="T42">）</text:span></text:p>
          </table:table-cell>
          <table:table-cell table:style-name="表格2.A3" office:value-type="string">
            <text:p text:style-name="P31" loext:marker-style-name="T41"><text:span text:style-name="T56">Root </text:span><text:span text:style-name="T42">必為最大值</text:span></text:p>
          </table:table-cell>
        </table:table-row>
      </table:table>
      <text:p text:style-name="P1"><text:soft-page-break/></text:p>
      <text:p text:style-name="P1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2" loext:marker-style-name="T41"><text:span text:style-name="T56">📌 </text:span><text:span text:style-name="T42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2" loext:marker-style-name="T41"><text:span text:style-name="T57">Heap</text:span><text:span text:style-name="T56"> = </text:span><text:span text:style-name="T165">Complete Binary Tree + Heap Property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二、</text:span><text:span text:style-name="T10">Heap </text:span><text:span text:style-name="T4">的陣列表示法（</text:span><text:span text:style-name="T10">Implicit Array</text:span><text:span text:style-name="T4">）</text:span></text:h>
      <text:p text:style-name="P32" loext:marker-style-name="T27"><text:span text:style-name="T28">由於 </text:span><text:span text:style-name="T168">Heap </text:span><text:span text:style-name="T170">是 </text:span><text:span text:style-name="T168">Complete Binary Tree</text:span><text:span text:style-name="T28">，</text:span><text:span text:style-name="T184">節點位置完全可預測</text:span><text:span text:style-name="T28">，因此不需要指標（</text:span><text:span text:style-name="T51">pointer</text:span><text:span text:style-name="T28">），直接用陣列儲存即可，這稱為 </text:span><text:span text:style-name="T51">Implicit Array</text:span><text:span text:style-name="T28">（隱式陣列）。</text:span></text:p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" loext:marker-style-name="T41"><text:span text:style-name="T42">【索引公式 — 考試必背】</text:span><text:span text:style-name="T41"/></text:p>
          </table:table-cell>
        </table:table-row>
        <table:table-row table:style-name="表格4.1">
          <table:table-cell table:style-name="表格4.A1" office:value-type="string">
            <text:p text:style-name="P2" loext:marker-style-name="T41"><text:span text:style-name="T56"><text:s text:c="2"/>Root <text:s text:c="5"/>→ A[1]</text:span><text:span text:style-name="T41"/></text:p>
          </table:table-cell>
        </table:table-row>
        <table:table-row table:style-name="表格4.1">
          <table:table-cell table:style-name="表格4.A1" office:value-type="string">
            <text:p text:style-name="P2" loext:marker-style-name="T41"><text:span text:style-name="T56"><text:s text:c="2"/></text:span><text:span text:style-name="T209">Parent</text:span><text:span text:style-name="T56"> <text:s text:c="3"/>→ A[</text:span><text:span text:style-name="T125">i / 2</text:span><text:span text:style-name="T56">] <text:s text:c="5"/></text:span><text:span text:style-name="T42">（整數除法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1"><text:span text:style-name="T56"><text:s text:c="2"/></text:span><text:span text:style-name="T177">Left child</text:span><text:span text:style-name="T56"> → A[</text:span><text:span text:style-name="T143">2i</text:span><text:span text:style-name="T56">] <text:s text:c="6"/></text:span><text:span text:style-name="T42">（</text:span><text:span text:style-name="T218">多生貴子</text:span><text:span text:style-name="T42">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1"><text:span text:style-name="T56"><text:s text:c="2"/></text:span><text:span text:style-name="T177">Right child</text:span><text:span text:style-name="T56"> → A[</text:span><text:span text:style-name="T143">2i + 1</text:span><text:span text:style-name="T56">]</text:span></text:p>
          </table:table-cell>
        </table:table-row>
      </table:table>
      <text:p text:style-name="P1"/>
      <text:h text:style-name="P16" text:outline-level="2" loext:marker-style-name="T17"><text:span text:style-name="T18">範例</text:span><text:span text:style-name="T17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" loext:marker-style-name="T41"><text:span text:style-name="T42">樹狀結構：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56"><text:s text:c="8"/>10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56"><text:s text:c="7"/>/ <text:s text:c="2"/>\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56"><text:s text:c="5"/>90 <text:s text:c="4"/>8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56"><text:s text:c="5"/>/ \ <text:s text:c="4"/>/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56"><text:s/>70 <text:s/>60 5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42">陣列儲存：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56"><text:s text:c="2"/>Index: <text:s/>1 <text:s text:c="3"/>2 <text:s text:c="3"/>3 <text:s text:c="3"/>4 <text:s text:c="3"/>5 <text:s text:c="3"/>6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56"><text:s text:c="2"/>Value: 100 <text:s text:c="2"/>90 <text:s text:c="2"/>80 <text:s text:c="2"/>70 <text:s text:c="2"/>60 <text:s text:c="2"/>5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42">驗證：</text:span><text:span text:style-name="T56">A[5] = 60</text:span><text:span text:style-name="T42">，</text:span><text:span text:style-name="T145">Parent = A[5/2] = A[2] </text:span><text:span text:style-name="T56">= 90 ✅</text:span></text:p>
          </table:table-cell>
        </table:table-row>
        <table:table-row table:style-name="表格5.1">
          <table:table-cell table:style-name="表格5.A1" office:value-type="string">
            <text:p text:style-name="P2" loext:marker-style-name="T41"><text:span text:style-name="T56"><text:s text:c="6"/></text:span><text:span text:style-name="T130">Left child = A[10]</text:span><text:span text:style-name="T42">，</text:span><text:span text:style-name="T284">Right child = A[11]</text:span><text:span text:style-name="T42">（皆為空）</text:span></text:p>
          </table:table-cell>
        </table:table-row>
      </table:table>
      <text:p text:style-name="P1"/>
      <text:p text:style-name="P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2" loext:marker-style-name="T41"><text:span text:style-name="T56">⚠️ <text:s/></text:span><text:span text:style-name="T42">考試陷阱：</text:span><text:span text:style-name="T116">陣列索引從 </text:span><text:span text:style-name="T125">1 </text:span><text:span text:style-name="T116">開始</text:span><text:span text:style-name="T42">，</text:span><text:span text:style-name="T35">不是 </text:span><text:span text:style-name="T57">0</text:span><text:span text:style-name="T42">。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1"><text:span text:style-name="T56"><text:s text:c="5"/></text:span><text:span text:style-name="T42">若從 </text:span><text:span text:style-name="T56">0 </text:span><text:span text:style-name="T42">開始則公式不同：</text:span><text:span text:style-name="T56">parent=(i-1)/2, left=2i+1, right=2i+2</text:span><text:span text:style-name="T42">。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1"><text:span text:style-name="T56"><text:s text:c="5"/></text:span><text:span text:style-name="T42">考題若未特別說明，</text:span><text:span text:style-name="T286">預設從 </text:span><text:span text:style-name="T288">1 </text:span><text:span text:style-name="T286">開始</text:span><text:span text:style-name="T42">。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三、</text:span><text:span text:style-name="T10">Heap </text:span><text:span text:style-name="T4">的核心操作與時間複雜度</text:span></text:h>
      <text:h text:style-name="P16" text:outline-level="2" loext:marker-style-name="T17"><text:span text:style-name="T25">3-1 </text:span><text:span text:style-name="T18">插入（</text:span><text:span text:style-name="T25">Insert</text:span><text:span text:style-name="T18">）— </text:span><text:span text:style-name="T25">Bubble Up</text:span><text:span text:style-name="T18">（向上浮）</text:span></text:h>
      <text:p text:style-name="P32" loext:marker-style-name="T27"><text:span text:style-name="T28">步驟：</text:span><text:span text:style-name="T27"/></text:p>
      <text:list xml:id="list91734076943522" text:continue-list="list4253724859" text:style-name="WWNum7">
        <text:list-item>
          <text:p text:style-name="P21" loext:marker-style-name="T33"><text:span text:style-name="T69">Step 1</text:span><text:span text:style-name="T34">：</text:span><text:span text:style-name="T220">將新元素放到陣列最後一個位置</text:span><text:span text:style-name="T34">（</text:span><text:span text:style-name="T69">Complete Binary Tree </text:span><text:span text:style-name="T34">的下一個</text:span><text:span text:style-name="T35">空位</text:span><text:span text:style-name="T34">）。</text:span></text:p>
        </text:list-item>
        <text:list-item text:style-override="WWNum8">
          <text:p text:style-name="P22" loext:marker-style-name="T33"><text:span text:style-name="T69">Step 2</text:span><text:span text:style-name="T34">：</text:span><text:span text:style-name="T212">與父節點比較</text:span><text:span text:style-name="T34">，若違反 </text:span><text:span text:style-name="T69">Heap Property</text:span><text:span text:style-name="T34">，則交換。</text:span></text:p>
        </text:list-item>
        <text:list-item text:style-override="WWNum9">
          <text:p text:style-name="P23" loext:marker-style-name="T33"><text:span text:style-name="T69">Step 3</text:span><text:span text:style-name="T34">：重複 </text:span><text:span text:style-name="T69">Step 2</text:span><text:span text:style-name="T34">，一路往上，直到滿足 </text:span><text:span text:style-name="T69">Heap Property </text:span><text:span text:style-name="T34">或抵達 </text:span><text:span text:style-name="T69">Root </text:span><text:span text:style-name="T34">為止。</text:span></text:p>
        </text:list-item>
      </text:list>
      <text:p text:style-name="P1"/>
      <text:p text:style-name="P34" loext:marker-style-name="T7"><text:span text:style-name="T8">完整範例：</text:span><text:span text:style-name="T12">Max Heap </text:span><text:span text:style-name="T8">插入 </text:span><text:span text:style-name="T12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" loext:marker-style-name="T41"><text:span text:style-name="T42">原始 </text:span><text:span text:style-name="T56">Max Heap</text:span><text:span text:style-name="T42">：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56"><text:s text:c="8"/>10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56"><text:s text:c="7"/>/ <text:s text:c="2"/>\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56"><text:s text:c="6"/>90 <text:s text:c="3"/>8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56"><text:s text:c="5"/>/ <text:s/>\ <text:s text:c="3"/>/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56">70 <text:s/>60 5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2">陣列：</text:span><text:span text:style-name="T56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56">Step 1</text:span><text:span text:style-name="T42">：</text:span><text:span text:style-name="T35">插入 </text:span><text:span text:style-name="T57">95</text:span><text:span text:style-name="T56"> → </text:span><text:span text:style-name="T37">放到 </text:span><text:span text:style-name="T61">index 7</text:span><text:span text:style-name="T37">（最後）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2">陣列：</text:span><text:span text:style-name="T56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56">Step 2</text:span><text:span text:style-name="T42">：</text:span><text:span text:style-name="T291">95 </text:span><text:span text:style-name="T295">的 </text:span><text:span text:style-name="T291">parent = A[7/2] = A[3]</text:span><text:span text:style-name="T56"> = 8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56"><text:s text:c="8"/></text:span><text:span text:style-name="T57">95 &gt; 80</text:span><text:span text:style-name="T56"> → </text:span><text:span text:style-name="T42">違反 </text:span><text:span text:style-name="T56">Max Heap → </text:span><text:span text:style-name="T39">交換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42">陣列：</text:span><text:span text:style-name="T56">[100, 90, </text:span><text:span text:style-name="T64">95</text:span><text:span text:style-name="T56">, 70, 60, 50, </text:span><text:span text:style-name="T64">80</text:span><text:span text:style-name="T56">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56">Step 3</text:span><text:span text:style-name="T42">：</text:span><text:span text:style-name="T291">95 </text:span><text:span text:style-name="T295">的 </text:span><text:span text:style-name="T291">parent = A[3/2] = A[1]</text:span><text:span text:style-name="T56"> = 10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56"><text:s text:c="7"/></text:span><text:span text:style-name="T57"><text:s/>95 &lt; 100</text:span><text:span text:style-name="T56"> → </text:span><text:span text:style-name="T42">符合 </text:span><text:span text:style-name="T56">Max Heap → </text:span><text:span text:style-name="T39">停止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ext:soft-page-break/>
        <table:table-row table:style-name="表格7.1">
          <table:table-cell table:style-name="表格7.A1" office:value-type="string">
            <text:p text:style-name="P2" loext:marker-style-name="T41"><text:span text:style-name="T42">最終結果：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56"><text:s text:c="8"/>10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56"><text:s text:c="7"/>/ <text:s text:c="2"/>\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2" loext:marker-style-name="T41"><text:span text:style-name="T56"><text:s text:c="5"/>90 <text:s text:c="3"/>95</text:span></text:p>
          </table:table-cell>
        </table:table-row>
        <table:table-row table:style-name="表格7.1">
          <table:table-cell table:style-name="表格7.A1" office:value-type="string">
            <text:p text:style-name="P43" loext:marker-style-name="T41"><text:span text:style-name="T56"><text:s text:c="5"/>/ <text:s/>\ <text:s text:c="2"/>/</text:span><text:span text:style-name="T41"> <text:s text:c="2"/>\</text:span></text:p>
          </table:table-cell>
        </table:table-row>
        <table:table-row table:style-name="表格7.1">
          <table:table-cell table:style-name="表格7.A1" office:value-type="string">
            <text:p text:style-name="P44" loext:marker-style-name="T41"><text:s/><text:span text:style-name="T56">70 <text:s/>60 50 <text:s/>80</text:span></text:p>
          </table:table-cell>
        </table:table-row>
      </table:table>
      <text:p text:style-name="P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" loext:marker-style-name="T41"><text:span text:style-name="T42">時間複雜度：</text:span><text:span text:style-name="T56">O(log n) <text:s/>← </text:span><text:span text:style-name="T42">最多往上走樹高（</text:span><text:span text:style-name="T56">h = log₂n</text:span><text:span text:style-name="T42">）步</text:span></text:p>
          </table:table-cell>
        </table:table-row>
      </table:table>
      <text:p text:style-name="P1"/>
      <text:p text:style-name="P1"/>
      <text:h text:style-name="P16" text:outline-level="2" loext:marker-style-name="T17"><text:span text:style-name="T25">3-2 </text:span><text:span text:style-name="T121">刪除最大值</text:span><text:span text:style-name="T18">（</text:span><text:span text:style-name="T25">Delete / Extract-Max</text:span><text:span text:style-name="T18">）— </text:span><text:span text:style-name="T25">Heapify</text:span><text:span text:style-name="T18">（向下沉）</text:span></text:h>
      <text:p text:style-name="P32" loext:marker-style-name="T27"><text:span text:style-name="T28">步驟：</text:span><text:span text:style-name="T27"/></text:p>
      <text:list xml:id="list91735818288545" text:continue-list="list91734076943522" text:style-name="WWNum10">
        <text:list-item>
          <text:p text:style-name="P24" loext:marker-style-name="T33"><text:span text:style-name="T69">Step 1</text:span><text:span text:style-name="T34">：</text:span><text:span text:style-name="T220">取出 </text:span><text:span text:style-name="T224">Root</text:span><text:span text:style-name="T220">（最大值）</text:span><text:span text:style-name="T34">。</text:span></text:p>
        </text:list-item>
        <text:list-item text:style-override="WWNum11">
          <text:p text:style-name="P25" loext:marker-style-name="T33"><text:span text:style-name="T69">Step 2</text:span><text:span text:style-name="T34">：</text:span><text:span text:style-name="T172">將陣列最後一個元素移到 </text:span><text:span text:style-name="T177">Root </text:span><text:span text:style-name="T172">位置。</text:span></text:p>
        </text:list-item>
        <text:list-item text:style-override="WWNum12">
          <text:p text:style-name="P26" loext:marker-style-name="T33"><text:span text:style-name="T69">Step 3</text:span><text:span text:style-name="T34">：</text:span><text:span text:style-name="T212">與兩個子節點中</text:span><text:span text:style-name="T230">較大的</text:span><text:span text:style-name="T212">比較</text:span><text:span text:style-name="T34">，若違反 </text:span><text:span text:style-name="T69">Heap Property</text:span><text:span text:style-name="T34">，則交換。</text:span></text:p>
        </text:list-item>
        <text:list-item text:style-override="WWNum13">
          <text:p text:style-name="P27" loext:marker-style-name="T33"><text:span text:style-name="T69">Step 4</text:span><text:span text:style-name="T34">：重複 </text:span><text:span text:style-name="T69">Step 3</text:span><text:span text:style-name="T34">（</text:span><text:span text:style-name="T69">Heapify / Bubble Down</text:span><text:span text:style-name="T34">），一路往下，直到滿足條件或抵達葉節點。</text:span></text:p>
        </text:list-item>
      </text:list>
      <text:p text:style-name="P1"/>
      <text:p text:style-name="P34" loext:marker-style-name="T7"><text:span text:style-name="T8">完整範例：</text:span><text:span text:style-name="T12">Max Heap </text:span><text:span text:style-name="T8">刪除 </text:span><text:span text:style-name="T12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" loext:marker-style-name="T41"><text:span text:style-name="T42">原始 </text:span><text:span text:style-name="T56">Max Heap</text:span><text:span text:style-name="T42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9"/>10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8"/>/ <text:s text:c="2"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7"/>90 <text:s text:c="3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6"/>/ \ <text:s text:c="2"/>/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/>70 <text:s/>60 <text:s/>5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Step 1</text:span><text:span text:style-name="T42">：取出 </text:span><text:span text:style-name="T56">Root = 10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Step 2</text:span><text:span text:style-name="T42">：</text:span><text:span text:style-name="T117">把最後元素 </text:span><text:span text:style-name="T126">50 </text:span><text:span text:style-name="T117">移到 </text:span><text:span text:style-name="T126">Root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9"/>5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7"/>9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4"/>70 <text:s/>60</text:span><text:span text:style-name="T41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Step 3</text:span><text:span text:style-name="T42">：</text:span><text:span text:style-name="T145">50 </text:span><text:span text:style-name="T155">的子節點 </text:span><text:span text:style-name="T145">90</text:span><text:span text:style-name="T155">、</text:span><text:span text:style-name="T145">80</text:span><text:span text:style-name="T155">，較大為 </text:span><text:span text:style-name="T145">9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8"/>50 &lt; 90 → </text:span><text:span text:style-name="T42">交換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9"/>9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7"/>5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4"/>70 <text:s/>6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Step 4</text:span><text:span text:style-name="T42">：</text:span><text:span text:style-name="T145">50 </text:span><text:span text:style-name="T155">的子節點 </text:span><text:span text:style-name="T145">70</text:span><text:span text:style-name="T155">、</text:span><text:span text:style-name="T145">60</text:span><text:span text:style-name="T155">，較大為 </text:span><text:span text:style-name="T145">7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8"/>50 &lt; 70 → </text:span><text:span text:style-name="T42">交換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9"/>9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7"/>7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<text:s text:c="3"/>50 <text:s/>6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56">Step 5</text:span><text:span text:style-name="T42">：</text:span><text:span text:style-name="T56">50 </text:span><text:span text:style-name="T42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1"><text:span text:style-name="T42">最終陣列：</text:span><text:span text:style-name="T56">[90, 70, 80, 50, 60]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" loext:marker-style-name="T41"><text:span text:style-name="T40">時間複雜度：</text:span><text:span text:style-name="T65">O(log n) </text:span><text:span text:style-name="T56"><text:s/>← </text:span><text:span text:style-name="T42">最多往下走樹高（</text:span><text:span text:style-name="T56">h = log₂n</text:span><text:span text:style-name="T42">）步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四、建立 </text:span><text:span text:style-name="T11">Heap</text:span><text:span text:style-name="T4">（</text:span><text:span text:style-name="T10">Build Heap</text:span><text:span text:style-name="T4">）</text:span></text:h>
      <text:h text:style-name="P16" text:outline-level="2" loext:marker-style-name="T17"><text:span text:style-name="T18">方法 </text:span><text:span text:style-name="T26">A</text:span><text:span text:style-name="T18">：逐個插入法</text:span></text:h>
      <text:p text:style-name="P32" loext:marker-style-name="T29"><text:span text:style-name="T30">從</text:span><text:span text:style-name="T122">空</text:span><text:span text:style-name="T30"> </text:span><text:span text:style-name="T52">Heap</text:span><text:span text:style-name="T55"> </text:span><text:span text:style-name="T30">開始，呼叫 </text:span><text:span text:style-name="T149">n </text:span><text:span text:style-name="T151">次 </text:span><text:span text:style-name="T149">Insert</text:span><text:span text:style-name="T30">，每次 </text:span><text:span text:style-name="T227">O(log n)</text:span><text:span text:style-name="T30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" loext:marker-style-name="T41"><text:span text:style-name="T70">總時間：</text:span><text:span text:style-name="T210">n × O(log n)</text:span><text:span text:style-name="T56"> = O(n log n)</text:span></text:p>
          </table:table-cell>
        </table:table-row>
      </table:table>
      <text:p text:style-name="P1"/>
      <text:h text:style-name="P16" text:outline-level="2" loext:marker-style-name="T17"><text:span text:style-name="T18">方法 </text:span><text:span text:style-name="T26">B</text:span><text:span text:style-name="T18">：</text:span><text:span text:style-name="T25">Bottom-Up Build Heap</text:span><text:span text:style-name="T18">（</text:span><text:span text:style-name="T25">Floyd</text:span><text:span text:style-name="T26"> </text:span><text:span text:style-name="T18">演算法）★考試重點★</text:span></text:h>
      <text:p text:style-name="P32" loext:marker-style-name="T29"><text:span text:style-name="T30">直接</text:span><text:span text:style-name="T231">將 </text:span><text:span text:style-name="T234">n </text:span><text:span text:style-name="T231">個元素放入陣列</text:span><text:span text:style-name="T30">，從</text:span><text:span text:style-name="T122">最後一個非葉節點（</text:span><text:span text:style-name="T135">index = ⌊n/2⌋</text:span><text:span text:style-name="T122">）開始</text:span><text:span text:style-name="T30">，</text:span><text:span text:style-name="T213">由下往上</text:span><text:span text:style-name="T30">逐一執行 </text:span><text:span text:style-name="T55">Heapify</text:span><text:span text:style-name="T30">。</text:span></text:p>
      <text:p text:style-name="P1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45" loext:marker-style-name="T236"><text:span text:style-name="T236">★ </text:span><text:span text:style-name="T237">為何從 <text:s text:c="2"/>?</text:span><text:span text:style-name="T236"> <text:s/>⌊n/2⌋ </text:span><text:span text:style-name="T237">開始？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1"><text:span text:style-name="T125">index &gt; ⌊n/2⌋ </text:span><text:span text:style-name="T127">的節點全部都是葉節點</text:span><text:span text:style-name="T70">（</text:span><text:span text:style-name="T104">無子節點</text:span><text:span text:style-name="T70">），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1"><text:span text:style-name="T70">葉節點本身已滿足 </text:span><text:span text:style-name="T56">Heap Property(</text:span><text:span text:style-name="T210">Heap Property</text:span><text:span text:style-name="T211">就是比較父節點</text:span><text:span text:style-name="T210">vs</text:span><text:span text:style-name="T211">子節點</text:span><text:span text:style-name="T70">；</text:span><text:span text:style-name="T225">葉節點沒有孩子 → 沒有東西可以比較 </text:span><text:span text:style-name="T42">→ 一定合法</text:span><text:span text:style-name="T70">。</text:span><text:span text:style-name="T56">)</text:span><text:span text:style-name="T70">，不需要 </text:span><text:span text:style-name="T56">Heapify</text:span><text:span text:style-name="T70">。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1"><text:span text:style-name="T70">因此</text:span><text:span text:style-name="T178">只需從 </text:span><text:span text:style-name="T177">index ⌊n/2⌋ </text:span><text:span text:style-name="T178">往 </text:span><text:span text:style-name="T177">index 1 </text:span><text:span text:style-name="T178">逐一執行</text:span><text:span text:style-name="T70">。</text:span></text:p>
          </table:table-cell>
        </table:table-row>
      </table:table>
      <text:p text:style-name="P1"/>
      <text:p text:style-name="P46" loext:marker-style-name="T29"><text:span text:style-name="T31">範例：將 </text:span><text:span text:style-name="T53">[50, 30, 80, 10, 20, 70, 90] </text:span><text:span text:style-name="T31">建成 </text:span><text:span text:style-name="T53">Max Heap <text:s text:c="61"/></text:span></text:p>
      <text:p text:style-name="P46" loext:marker-style-name="T29"><text:span text:style-name="T53"/></text:p>
      <text:p text:style-name="P46" loext:marker-style-name="T29"><text:span text:style-name="T53">(</text:span><text:span text:style-name="T164">index = ⌊n/2⌋為最後一個非葉節點；index &gt; ⌊n/2⌋ 的節點全部都是葉節點</text:span><text:span text:style-name="T53">)</text:span></text:p>
      <text:p text:style-name="P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" loext:marker-style-name="T41"><text:span text:style-name="T70">初始陣列（</text:span><text:span text:style-name="T56">index </text:span><text:span text:style-name="T70">從 </text:span><text:span text:style-name="T56">1 </text:span><text:span text:style-name="T70">開始）：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56">index</text:span><text:span text:style-name="T70">： <text:s/></text:span><text:span text:style-name="T56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56">value</text:span><text:span text:style-name="T70">： <text:s/></text:span><text:span text:style-name="T56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57">n = 7</text:span><text:span text:style-name="T70">，</text:span><text:span text:style-name="T106">最後非葉節點 </text:span><text:span text:style-name="T107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70">（</text:span><text:span text:style-name="T128">index 4</text:span><text:span text:style-name="T129">、</text:span><text:span text:style-name="T128">5</text:span><text:span text:style-name="T129">、</text:span><text:span text:style-name="T128">6</text:span><text:span text:style-name="T129">、</text:span><text:span text:style-name="T128">7 </text:span><text:span text:style-name="T129">皆為葉節點</text:span><text:span text:style-name="T70">，不需 </text:span><text:span text:style-name="T56">Heapify</text:span><text:span text:style-name="T70">）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70">初始樹狀結構：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56"><text:s text:c="13"/>50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56"><text:s text:c="12"/>/ <text:s/>\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56"><text:s text:c="8"/>30 <text:s text:c="3"/>80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56"><text:s text:c="7"/>/ \ <text:s text:c="6"/>/ \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1"><text:span text:style-name="T56"><text:s text:c="3"/>10 <text:s/>20 70 <text:s/>90</text:span><text:span text:style-name="T41"/></text:p>
          </table:table-cell>
        </table:table-row>
      </table:table>
      <text:p text:style-name="P1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" loext:marker-style-name="T41"><text:span text:style-name="T56">→</text:span><text:span text:style-name="T74"> </text:span><text:span text:style-name="T200">Heapify(3)</text:span><text:span text:style-name="T201">：</text:span><text:span text:style-name="T200">index 3 = 80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56"><text:s text:c="2"/></text:span><text:span text:style-name="T70">子節點：</text:span><text:span text:style-name="T56">index 6 = 70</text:span><text:span text:style-name="T70">，</text:span><text:span text:style-name="T56">index 7 = 90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56"><text:s text:c="2"/></text:span><text:span text:style-name="T64">Max Heap </text:span><text:span text:style-name="T66">要求父 ≥ 子</text:span><text:span text:style-name="T70">，但 </text:span><text:span text:style-name="T56">80 &lt; 90 → </text:span><text:span text:style-name="T70">違反！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56"><text:s text:c="2"/>80 </text:span><text:span text:style-name="T70">與 </text:span><text:span text:style-name="T56">90 </text:span><text:span text:style-name="T70">交換</text:span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56"><text:s text:c="2"/></text:span><text:span text:style-name="T70">交換後：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56"><text:s text:c="13"/>50</text:span><text:span text:style-name="T41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2" loext:marker-style-name="T41"><text:span text:style-name="T56"><text:s text:c="13"/>/ <text:s/>\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56"><text:s text:c="8"/>30 <text:s text:c="3"/>90 <text:s text:c="5"/>← 90 </text:span><text:span text:style-name="T70">上來了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56"><text:s text:c="5"/>/ \ <text:s text:c="6"/>/ \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56"><text:s/>10 <text:s/>20 70 <text:s/>80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56"><text:s text:c="2"/></text:span><text:span text:style-name="T70">陣列：</text:span><text:span text:style-name="T56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1"><text:span text:style-name="T56"><text:s text:c="2"/>80 </text:span><text:span text:style-name="T70">已是葉節點 → 停止</text:span></text:p>
          </table:table-cell>
        </table:table-row>
      </table:table>
      <text:p text:style-name="P1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" loext:marker-style-name="T41"><text:span text:style-name="T56">→</text:span><text:span text:style-name="T200"> Heapify(2)</text:span><text:span text:style-name="T201">：</text:span><text:span text:style-name="T200">index 2 = 30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56"><text:s text:c="2"/></text:span><text:span text:style-name="T70">子節點：</text:span><text:span text:style-name="T56">index 4 = 10</text:span><text:span text:style-name="T70">，</text:span><text:span text:style-name="T56">index 5 = 20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56"><text:s text:c="2"/></text:span><text:span text:style-name="T62">30 ≥ 20 </text:span><text:span text:style-name="T63">且 </text:span><text:span text:style-name="T62">30 ≥ 10 → </text:span><text:span text:style-name="T63">符合 </text:span><text:span text:style-name="T62">Max Heap → </text:span><text:span text:style-name="T63">無需交換</text:span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56"><text:s text:c="2"/></text:span><text:span text:style-name="T70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56"><text:s text:c="11"/>5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56"><text:s text:c="10"/>/ <text:s/>\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56"><text:s text:c="8"/>30 <text:s text:c="3"/>9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56"><text:s text:c="7"/>/ \ <text:s text:c="2"/>/ \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56"><text:s text:c="5"/>10 <text:s/>20 70 <text:s/>8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1"><text:span text:style-name="T56"><text:s text:c="2"/></text:span><text:span text:style-name="T70">陣列：</text:span><text:span text:style-name="T56">[50, 30, 90, 10, 20, 70, 80]</text:span></text:p>
          </table:table-cell>
        </table:table-row>
      </table:table>
      <text:p text:style-name="P1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" loext:marker-style-name="T41"><text:span text:style-name="T56">→ </text:span><text:span text:style-name="T200">Heapify(1)</text:span><text:span text:style-name="T201">：</text:span><text:span text:style-name="T200">index 1 = 5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2"/></text:span><text:span text:style-name="T70">子節點：</text:span><text:span text:style-name="T56">index 2 = 30</text:span><text:span text:style-name="T70">，</text:span><text:span text:style-name="T56">index 3 = 9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2"/></text:span><text:span text:style-name="T127">較大子節點</text:span><text:span text:style-name="T70">為 </text:span><text:span text:style-name="T56">90 &gt; 50 → </text:span><text:span text:style-name="T57">50 </text:span><text:span text:style-name="T59">與 </text:span><text:span text:style-name="T57">90 </text:span><text:span text:style-name="T59">交換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2"/></text:span><text:span text:style-name="T70">第 </text:span><text:span text:style-name="T56">1 </text:span><text:span text:style-name="T70">步交換後：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11"/>90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10"/>/ <text:s/>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8"/>30 <text:s text:c="3"/>50 <text:s text:c="5"/>← </text:span><text:span text:style-name="T67">50 </text:span><text:span text:style-name="T68">下沉到 </text:span><text:span text:style-name="T67">index 3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7"/>/ \ <text:s text:c="2"/>/ 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5"/>10 <text:s/>20 70 <text:s/>80</text:span><text:span text:style-name="T41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2"/></text:span><text:span text:style-name="T70">陣列：</text:span><text:span text:style-name="T56">[90, 30, 50, 10, 20, 70, 80]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2"/></text:span><text:span text:style-name="T224">50 </text:span><text:span text:style-name="T225">繼續下沉</text:span><text:span text:style-name="T70">：子節點 </text:span><text:span text:style-name="T56">index 6 = 70</text:span><text:span text:style-name="T70">，</text:span><text:span text:style-name="T56">index 7 = 8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2"/></text:span><text:span text:style-name="T127">較大子節點</text:span><text:span text:style-name="T70">為 </text:span><text:span text:style-name="T56">80 &gt; 50 → </text:span><text:span text:style-name="T58">50 </text:span><text:span text:style-name="T60">與 </text:span><text:span text:style-name="T58">80 </text:span><text:span text:style-name="T60">交換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2"/></text:span><text:span text:style-name="T70">第 </text:span><text:span text:style-name="T56">2 </text:span><text:span text:style-name="T70">步交換後：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11"/>90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10"/>/ <text:s/>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8"/>30 <text:s text:c="3"/>80 <text:s text:c="5"/>← 80 </text:span><text:span text:style-name="T70">上來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7"/>/ \ <text:s text:c="6"/>/ 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4"/>10 <text:s/>20 70 <text:s/>50 <text:s text:c="3"/>← 50 </text:span><text:span text:style-name="T70">落到葉節點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2"/>50 </text:span><text:span text:style-name="T70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1"><text:span text:style-name="T56"><text:s text:c="2"/></text:span><text:span text:style-name="T70">陣列：</text:span><text:span text:style-name="T56">[90, 30, 80, 10, 20, 70, 50]</text:span></text:p>
          </table:table-cell>
        </table:table-row>
      </table:table>
      <text:p text:style-name="P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" loext:marker-style-name="T41"><text:span text:style-name="T70">最終結果：</text:span><text:span text:style-name="T56">Max Heap ✓</text:span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1"><text:span text:style-name="T56"><text:s text:c="11"/>90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1"><text:span text:style-name="T56"><text:s text:c="10"/>/ <text:s/>\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1"><text:span text:style-name="T56"><text:s text:c="8"/>30 <text:s text:c="3"/>80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1"><text:span text:style-name="T56"><text:s text:c="7"/>/ \ <text:s text:c="6"/>/ \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1"><text:span text:style-name="T56"><text:s text:c="3"/>10 <text:s/>20 70 <text:s/>50</text:span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1"><text:span text:style-name="T70">陣列：</text:span><text:span text:style-name="T56">[90, 30, 80, 10, 20, 70, 50]</text:span></text:p>
          </table:table-cell>
        </table:table-row>
      </table:table>
      <text:p text:style-name="P1"/>
      <text:h text:style-name="P16" text:outline-level="2" loext:marker-style-name="T17"><text:span text:style-name="T26">★ </text:span><text:span text:style-name="T121">為何 </text:span><text:span text:style-name="T140">Bottom-Up Build Heap</text:span><text:span text:style-name="T141"> =</text:span><text:span text:style-name="T26"> </text:span><text:span text:style-name="T240">O(n)</text:span><text:span text:style-name="T18">？</text:span></text:h>
      <text:p text:style-name="P32" loext:marker-style-name="T29"><text:span text:style-name="T30">關鍵直覺：</text:span><text:span text:style-name="T213">每個節點 </text:span><text:span text:style-name="T216">Heapify </text:span><text:span text:style-name="T213">的代價 </text:span><text:span text:style-name="T216">= </text:span><text:span text:style-name="T213">它在樹中的「高度」</text:span><text:span text:style-name="T30">（</text:span><text:span text:style-name="T171">往下最多能走幾層</text:span><text:span text:style-name="T30">）。</text:span></text:p>
      <text:p text:style-name="P32" loext:marker-style-name="T29"><text:span text:style-name="T30">高度愈低的節點數量愈多，代價愈小；高度愈高的節點數量愈少，代價愈大。兩者相乘加總後收斂至 </text:span><text:span text:style-name="T55">O(n)</text:span><text:span text:style-name="T30">。</text:span></text:p>
      <text:p text:style-name="P1"/>
      <table:table table:name="表格18" table:style-name="表格18">
        <table:table-column table:style-name="表格18.A"/>
        <text:soft-page-break/>
        <table:table-row table:style-name="表格18.1">
          <table:table-cell table:style-name="表格18.A1" office:value-type="string">
            <text:p text:style-name="P2" loext:marker-style-name="T41"><text:span text:style-name="T70">數學推導（高度加總法）：</text:span><text:span text:style-name="T108">(</text:span><text:span text:style-name="T100">後補</text:span><text:span text:style-name="T108">)</text:span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1"><text:span text:style-name="T56"><text:s text:c="2"/></text:span><text:span text:style-name="T70">高度為 </text:span><text:span text:style-name="T56">h </text:span><text:span text:style-name="T70">的節點數量 ≤ ⌈</text:span><text:span text:style-name="T56">n / 2^(h+1)⌉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1"><text:span text:style-name="T56"><text:s text:c="2"/></text:span><text:span text:style-name="T70">每個高度 </text:span><text:span text:style-name="T56">h </text:span><text:span text:style-name="T70">的節點，</text:span><text:span text:style-name="T56">Heapify </text:span><text:span text:style-name="T70">最多走 </text:span><text:span text:style-name="T56">h </text:span><text:span text:style-name="T70">步</text:span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1"><text:span text:style-name="T56"><text:s text:c="2"/>T(n) = Σ(h=0 </text:span><text:span text:style-name="T70">到 ⌊</text:span><text:span text:style-name="T56">log n⌋) <text:s/>⌈n/2^(h+1)⌉ × h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1"><text:span text:style-name="T56"><text:s text:c="7"/>≤ n × Σ(h=0 </text:span><text:span text:style-name="T70">到 ∞</text:span><text:span text:style-name="T56">) <text:s/>h / 2^h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1"><text:span text:style-name="T56"><text:s text:c="7"/>= n × 2 <text:s/>= <text:s/>O(n)</text:span><text:span text:style-name="T41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1"><text:span text:style-name="T56"><text:s text:c="2"/></text:span><text:span text:style-name="T70">（∑ </text:span><text:span text:style-name="T56">h/2^h </text:span><text:span text:style-name="T70">是收斂等比級數，值為 </text:span><text:span text:style-name="T56">2</text:span><text:span text:style-name="T70">）</text:span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1"><text:span text:style-name="T70">白話理解：葉節點約佔一半，</text:span><text:span text:style-name="T56">Heapify </text:span><text:span text:style-name="T70">代價為 </text:span><text:span text:style-name="T56">0</text:span><text:span text:style-name="T70">；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179"><text:span text:style-name="T180">往上每層節點數減半，代價只加 </text:span><text:span text:style-name="T179">1</text:span><text:span text:style-name="T180">。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1"><text:span text:style-name="T238">整體工作量被大量葉節點的「零代價」攤平</text:span><text:span text:style-name="T70">，總代價 ∝ </text:span><text:span text:style-name="T56">n</text:span><text:span text:style-name="T70">。</text:span></text:p>
          </table:table-cell>
        </table:table-row>
      </table:table>
      <text:p text:style-name="P1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31" loext:marker-style-name="T5"><text:span text:style-name="T6">方法</text:span><text:span text:style-name="T5"/></text:p>
            </table:table-cell>
            <table:table-cell table:style-name="表格19.A1" office:value-type="string">
              <text:p text:style-name="P31" loext:marker-style-name="T5"><text:span text:style-name="T6">時間複雜度</text:span><text:span text:style-name="T5"/></text:p>
            </table:table-cell>
            <table:table-cell table:style-name="表格19.A1" office:value-type="string">
              <text:p text:style-name="P31" loext:marker-style-name="T5"><text:span text:style-name="T6">適用情境</text:span><text:span text:style-name="T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31" loext:marker-style-name="T181"><text:span text:style-name="T182">逐個 </text:span><text:span text:style-name="T181">Insert</text:span></text:p>
          </table:table-cell>
          <table:table-cell table:style-name="表格19.A2" office:value-type="string">
            <text:p text:style-name="P31" loext:marker-style-name="T41"><text:span text:style-name="T56">O(</text:span><text:span text:style-name="T57">n log n</text:span><text:span text:style-name="T56">)</text:span></text:p>
          </table:table-cell>
          <table:table-cell table:style-name="表格19.A2" office:value-type="string">
            <text:p text:style-name="P31" loext:marker-style-name="T41"><text:span text:style-name="T70">動態逐一加入</text:span><text:span text:style-name="T41"/></text:p>
          </table:table-cell>
        </table:table-row>
        <table:table-row table:style-name="表格19.1">
          <table:table-cell table:style-name="表格19.A3" office:value-type="string">
            <text:p text:style-name="P31" loext:marker-style-name="T181"><text:span text:style-name="T181">Bottom-Up Build Heap</text:span><text:span text:style-name="T181"/></text:p>
          </table:table-cell>
          <table:table-cell table:style-name="表格19.A3" office:value-type="string">
            <text:p text:style-name="P31" loext:marker-style-name="T41"><text:span text:style-name="T56">O(</text:span><text:span text:style-name="T57">n</text:span><text:span text:style-name="T56">) ★</text:span></text:p>
          </table:table-cell>
          <table:table-cell table:style-name="表格19.A3" office:value-type="string">
            <text:p text:style-name="P31" loext:marker-style-name="T41"><text:span text:style-name="T70">一次性建立</text:span><text:span text:style-name="T41"/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五、</text:span><text:span text:style-name="T10">Heap Sort</text:span><text:span text:style-name="T4">（堆積排序）</text:span></text:h>
      <text:p text:style-name="P32" loext:marker-style-name="T29"><text:span text:style-name="T55">Heap Sort </text:span><text:span text:style-name="T30">利用 </text:span><text:span text:style-name="T55">Heap </text:span><text:span text:style-name="T30">結構進行排序，分為兩個階段：</text:span></text:p>
      <text:p text:style-name="P1"/>
      <text:list xml:id="list1695230943" text:style-name="WWNum2">
        <text:list-item>
          <text:p text:style-name="P35" loext:marker-style-name="T29"><text:span text:style-name="T55">Phase 1</text:span><text:span text:style-name="T30">：</text:span><text:span text:style-name="T169">Build Heap</text:span><text:span text:style-name="T55"> — </text:span><text:span text:style-name="T242">將原始陣列建成 </text:span><text:span text:style-name="T243">Max Heap</text:span><text:span text:style-name="T30">，時間 </text:span><text:span text:style-name="T55">O(n)</text:span><text:span text:style-name="T30">。</text:span></text:p>
        </text:list-item>
        <text:list-item>
          <text:p text:style-name="P35" loext:marker-style-name="T29"><text:span text:style-name="T55">Phase 2</text:span><text:span text:style-name="T30">：</text:span><text:span text:style-name="T122">反覆 </text:span><text:span text:style-name="T135">Extract-Max</text:span><text:span text:style-name="T55"> — </text:span><text:span text:style-name="T101">取出 </text:span><text:span text:style-name="T109">Root</text:span><text:span text:style-name="T101">（最大值），放到陣列末端</text:span><text:span text:style-name="T30">，</text:span><text:span text:style-name="T32">再 </text:span><text:span text:style-name="T52">Heapify</text:span><text:span text:style-name="T30">，重複 </text:span><text:span text:style-name="T54">n-1</text:span><text:span text:style-name="T55"> </text:span><text:span text:style-name="T30">次，每次 </text:span><text:span text:style-name="T55">O(</text:span><text:span text:style-name="T216">log n</text:span><text:span text:style-name="T55">)</text:span><text:span text:style-name="T30">。</text:span></text:p>
        </text:list-item>
      </text:list>
      <text:p text:style-name="P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" loext:marker-style-name="T41"><text:span text:style-name="T56">Heap Sort </text:span><text:span text:style-name="T70">總時間 </text:span><text:span text:style-name="T56">= O(</text:span><text:span text:style-name="T57">n</text:span><text:span text:style-name="T56">) + O(</text:span><text:span text:style-name="T57">n log n</text:span><text:span text:style-name="T56">) = O(</text:span><text:span text:style-name="T210">n log n</text:span><text:span text:style-name="T56">)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1"><text:span text:style-name="T70">空間複雜度 </text:span><text:span text:style-name="T56">= O(1)</text:span><text:span text:style-name="T70">（</text:span><text:span text:style-name="T56">In-place</text:span><text:span text:style-name="T70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1"><text:span text:style-name="T70">穩定性 </text:span><text:span text:style-name="T56">= </text:span><text:span text:style-name="T70">不穩定（</text:span><text:span text:style-name="T56">Unstable</text:span><text:span text:style-name="T70">）</text:span></text:p>
          </table:table-cell>
        </table:table-row>
      </table:table>
      <text:p text:style-name="P1"/>
      <text:p text:style-name="P32" loext:marker-style-name="T29"><text:soft-page-break/><text:span text:style-name="T31">範例：對 </text:span><text:span text:style-name="T53">[4, 2, 7, 1, 5] </text:span><text:span text:style-name="T31">排序</text:span></text:p>
      <text:p text:style-name="P1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" loext:marker-style-name="T41"><text:span text:style-name="T56">Phase 1 — </text:span><text:span text:style-name="T181">Build Max Heap</text:span><text:span text:style-name="T70">：</text:span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70">原始：</text:span><text:span text:style-name="T56">[4, 2, 7, 1, 5]</text:span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7">n=5</text:span><text:span text:style-name="T70">，</text:span><text:span text:style-name="T144">最後非葉節點 </text:span><text:span text:style-name="T143">= </text:span><text:span text:style-name="T125">⌊5/2⌋ = 2</text:span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70">初始樹狀：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8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5"/></text:span><text:span text:style-name="T125"><text:s/>2</text:span><text:span text:style-name="T56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4"/>1 <text:s text:c="2"/>5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177">Heapify(2)</text:span><text:span text:style-name="T70">：</text:span><text:span text:style-name="T57">2 </text:span><text:span text:style-name="T59">的子節點 </text:span><text:span text:style-name="T57">1, 5</text:span><text:span text:style-name="T70">；</text:span><text:span text:style-name="T210">5 &gt; 2 → </text:span><text:span text:style-name="T211">交換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8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6"/>5 <text:s text:c="2"/>7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4"/>1 <text:s text:c="2"/>2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177">Heapify(1)</text:span><text:span text:style-name="T70">：</text:span><text:span text:style-name="T57">4 </text:span><text:span text:style-name="T59">的子節點 </text:span><text:span text:style-name="T57">5, 7</text:span><text:span text:style-name="T70">；</text:span><text:span text:style-name="T210">7 &gt; 4 → </text:span><text:span text:style-name="T211">交換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8"/>7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6"/>5 <text:s text:c="2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<text:s text:c="4"/>1 <text:s text:c="2"/>2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1"><text:span text:style-name="T56">Max Heap </text:span><text:span text:style-name="T70">完成：</text:span><text:span text:style-name="T56">[7, 5, 4, 1, 2]</text:span></text:p>
          </table:table-cell>
        </table:table-row>
      </table:table>
      <text:p text:style-name="P1"/>
      <table:table table:name="表格22" table:style-name="表格22">
        <table:table-column table:style-name="表格22.A"/>
        <text:soft-page-break/>
        <table:table-row table:style-name="表格22.1">
          <table:table-cell table:style-name="表格22.A1" office:value-type="string">
            <text:p text:style-name="P2" loext:marker-style-name="T41"><text:span text:style-name="T56">Phase 2 — </text:span><text:span text:style-name="T226">反覆</text:span><text:span text:style-name="T70"> </text:span><text:span text:style-name="T125">Extract-Max</text:span><text:span text:style-name="T70">：</text:span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Step 1</text:span><text:span text:style-name="T70">：取出 </text:span><text:span text:style-name="T56">Root=7</text:span><text:span text:style-name="T70">，末端 </text:span><text:span text:style-name="T56">2 </text:span><text:span text:style-name="T70">移到 </text:span><text:span text:style-name="T56">Root</text:span><text:span text:style-name="T70">，</text:span><text:span text:style-name="T56">Heapify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2"/>→ [5, 2, 4, 1 |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8"/>5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7"/>/ \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6"/>2 <text:s text:c="2"/>4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5"/>/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4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Step 2</text:span><text:span text:style-name="T70">：取出 </text:span><text:span text:style-name="T56">Root=5</text:span><text:span text:style-name="T70">，末端 </text:span><text:span text:style-name="T56">1 </text:span><text:span text:style-name="T70">移到 </text:span><text:span text:style-name="T56">Root</text:span><text:span text:style-name="T70">，</text:span><text:span text:style-name="T56">Heapify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2"/>→ [4, 2, 1 |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8"/>4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7"/>/ \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6"/>2 <text:s text:c="2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Step 3</text:span><text:span text:style-name="T70">：取出 </text:span><text:span text:style-name="T56">Root=4</text:span><text:span text:style-name="T70">，末端 </text:span><text:span text:style-name="T56">1 </text:span><text:span text:style-name="T70">移到 </text:span><text:span text:style-name="T56">Root</text:span><text:span text:style-name="T70">，</text:span><text:span text:style-name="T56">Heapify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2"/>→ [2, 1 | 4,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8"/>2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7"/>/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6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Step 4</text:span><text:span text:style-name="T70">：取出 </text:span><text:span text:style-name="T56">Root=2</text:span><text:span text:style-name="T70">，末端 </text:span><text:span text:style-name="T56">1 </text:span><text:span text:style-name="T70">移到 </text:span><text:span text:style-name="T56">Root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2"/>→ [1 | 2, 4,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1"><text:span text:style-name="T56"><text:s text:c="8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224"><text:span text:style-name="T225">最終排序（升冪）：</text:span><text:span text:style-name="T224">[1, 2, 4, 5, 7] ✓</text:span></text:p>
          </table:table-cell>
        </table:table-row>
      </table:table>
      <text:p text:style-name="P1"/>
      <text:p text:style-name="P1"/>
      <text:h text:style-name="P13" text:outline-level="1" loext:marker-style-name="T3"><text:soft-page-break/><text:span text:style-name="T4">六、優先佇列（</text:span><text:span text:style-name="T10">Priority Queue</text:span><text:span text:style-name="T4">）實作方式比較</text:span></text:h>
      <text:p text:style-name="P32" loext:marker-style-name="T29"><text:span text:style-name="T109">Priority Queue</text:span><text:span text:style-name="T101">（優先佇列）</text:span><text:span text:style-name="T30">是</text:span><text:span text:style-name="T171">每次取出「優先值最高」元素的資料結構</text:span><text:span text:style-name="T30">。三種常見實作比較：</text:span></text:p>
      <text:p text:style-name="P1"/>
      <table:table table:name="表格23" table:style-name="表格23">
        <table:table-column table:style-name="表格23.A" table:number-columns-repeated="3"/>
        <table:table-header-rows>
          <table:table-row table:style-name="表格23.1">
            <table:table-cell table:style-name="表格23.A1" office:value-type="string">
              <text:p text:style-name="P31" loext:marker-style-name="T5"><text:span text:style-name="T6">實作方式</text:span><text:span text:style-name="T5"/></text:p>
            </table:table-cell>
            <table:table-cell table:style-name="表格23.A1" office:value-type="string">
              <text:p text:style-name="P31" loext:marker-style-name="T5"><text:span text:style-name="T13">Insert</text:span><text:span text:style-name="T5"/></text:p>
            </table:table-cell>
            <table:table-cell table:style-name="表格23.A1" office:value-type="string">
              <text:p text:style-name="P31" loext:marker-style-name="T5"><text:span text:style-name="T13">Extract-Max</text:span><text:span text:style-name="T6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31" loext:marker-style-name="T41"><text:span text:style-name="T182">排序好的</text:span><text:span text:style-name="T70">陣列</text:span></text:p>
          </table:table-cell>
          <table:table-cell table:style-name="表格23.A2" office:value-type="string">
            <text:p text:style-name="P31" loext:marker-style-name="T41"><text:span text:style-name="T56">O(n)</text:span><text:span text:style-name="T41"/></text:p>
          </table:table-cell>
          <table:table-cell table:style-name="表格23.A2" office:value-type="string">
            <text:p text:style-name="P31" loext:marker-style-name="T41"><text:span text:style-name="T56">O(1) <text:s/></text:span><text:span text:style-name="T70">取快插慢</text:span></text:p>
          </table:table-cell>
        </table:table-row>
        <table:table-row table:style-name="表格23.1">
          <table:table-cell table:style-name="表格23.A2" office:value-type="string">
            <text:p text:style-name="P31" loext:marker-style-name="T41"><text:span text:style-name="T182">未排序的</text:span><text:span text:style-name="T70">陣列</text:span></text:p>
          </table:table-cell>
          <table:table-cell table:style-name="表格23.A2" office:value-type="string">
            <text:p text:style-name="P31" loext:marker-style-name="T41"><text:span text:style-name="T56">O(1)</text:span><text:span text:style-name="T41"/></text:p>
          </table:table-cell>
          <table:table-cell table:style-name="表格23.A2" office:value-type="string">
            <text:p text:style-name="P31" loext:marker-style-name="T41"><text:span text:style-name="T56">O(n) <text:s/></text:span><text:span text:style-name="T70">插快取慢</text:span></text:p>
          </table:table-cell>
        </table:table-row>
        <table:table-row table:style-name="表格23.1">
          <table:table-cell table:style-name="表格23.A4" office:value-type="string">
            <text:p text:style-name="P31" loext:marker-style-name="T41"><text:span text:style-name="T56">Max Heap ★</text:span><text:span text:style-name="T41"/></text:p>
          </table:table-cell>
          <table:table-cell table:style-name="表格23.A4" office:value-type="string">
            <text:p text:style-name="P31" loext:marker-style-name="T210"><text:span text:style-name="T210">O(log n)</text:span><text:span text:style-name="T210"/></text:p>
          </table:table-cell>
          <table:table-cell table:style-name="表格23.A4" office:value-type="string">
            <text:p text:style-name="P31" loext:marker-style-name="T41"><text:span text:style-name="T177">O(log n)</text:span><text:span text:style-name="T56"> <text:s/></text:span><text:span text:style-name="T70">兩者均衡</text:span></text:p>
          </table:table-cell>
        </table:table-row>
      </table:table>
      <text:p text:style-name="P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2" loext:marker-style-name="T41"><text:span text:style-name="T56">💡 </text:span><text:span text:style-name="T70">考試重點：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41"><text:span text:style-name="T125">Heap </text:span><text:span text:style-name="T127">是 </text:span><text:span text:style-name="T125">Priority Queue </text:span><text:span text:style-name="T127">最常見的實作</text:span><text:span text:style-name="T70">，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41"><text:span text:style-name="T70">原因是 </text:span><text:span text:style-name="T210">Insert </text:span><text:span text:style-name="T211">和 </text:span><text:span text:style-name="T210">Extract </text:span><text:span text:style-name="T211">都是 </text:span><text:span text:style-name="T210">O(log n)</text:span><text:span text:style-name="T70">，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41"><text:span text:style-name="T70">是</text:span><text:span text:style-name="T225">三種方案中最均衡的折衷解</text:span><text:span text:style-name="T70">。</text:span></text:p>
          </table:table-cell>
        </table:table-row>
        <table:table-row table:style-name="表格24.1">
          <table:table-cell table:style-name="表格24.A1" office:value-type="string">
            <text:p text:style-name="P2"/>
          </table:table-cell>
        </table:table-row>
        <table:table-row table:style-name="表格24.1">
          <table:table-cell table:style-name="表格24.A1" office:value-type="string">
            <text:p text:style-name="P2" loext:marker-style-name="T41"><text:span text:style-name="T70">應用場景：印表機緩衝（高優先文件先印）、作業系統 </text:span><text:span text:style-name="T56">CPU </text:span><text:span text:style-name="T70">排程。</text:span></text:p>
          </table:table-cell>
        </table:table-row>
      </table:table>
      <text:p text:style-name="P1"/>
      <text:p text:style-name="P1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" loext:marker-style-name="T41"><text:span text:style-name="T56">① </text:span><text:span text:style-name="T182">排序好的</text:span><text:span text:style-name="T70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Insert 50</text:span><text:span text:style-name="T70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2"/>Before: <text:s/>[10, 30, 70, 8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2"/></text:span><text:span text:style-name="T70">挪動 </text:span><text:span text:style-name="T56">70, 80 </text:span><text:span text:style-name="T70">後</text:span><text:span text:style-name="T56">: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2"/>After: <text:s text:c="2"/>[10, 30, </text:span><text:span text:style-name="T64">50</text:span><text:span text:style-name="T56">, 70, 80] <text:s text:c="2"/>← </text:span><text:span text:style-name="T57">O(n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Extract-Max</text:span><text:span text:style-name="T70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2"/>Before: <text:s/>[10, 30, 50, 70, 8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2"/>After: <text:s text:c="2"/>[10, 30, 50, 70] <text:s text:c="2"/></text:span><text:span text:style-name="T70">取出 </text:span><text:span text:style-name="T56">80 <text:s text:c="2"/>←</text:span><text:span text:style-name="T57"> O(1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② </text:span><text:span text:style-name="T182">未排序的</text:span><text:span text:style-name="T70">陣列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Insert 50</text:span><text:span text:style-name="T70">：直接放末端，不管順序</text:span></text:p>
          </table:table-cell>
        </table:table-row>
        <text:soft-page-break/>
        <table:table-row table:style-name="表格25.1">
          <table:table-cell table:style-name="表格25.A1" office:value-type="string">
            <text:p text:style-name="P2" loext:marker-style-name="T41"><text:span text:style-name="T56"><text:s text:c="2"/>Before: <text:s/>[80, 10, 30, 7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2"/>After: <text:s text:c="2"/>[80, 10, 30, 70, 50] <text:s text:c="2"/>← </text:span><text:span text:style-name="T57">O(1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Extract-Max</text:span><text:span text:style-name="T70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2"/>Before: <text:s/>[80, 10, 30, 70, 5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2"/></text:span><text:span text:style-name="T70">掃描</text:span><text:span text:style-name="T56">: 80? 10? 30? 70? 50? <text:s/>→ </text:span><text:span text:style-name="T70">找到 </text:span><text:span text:style-name="T56">80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2"/>After: <text:s text:c="2"/>[10, 30, 70, 50] <text:s text:c="2"/></text:span><text:span text:style-name="T70">取出 </text:span><text:span text:style-name="T56">80 <text:s text:c="2"/>← </text:span><text:span text:style-name="T57">O(n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③ Max Heap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Insert 50</text:span><text:span text:style-name="T70">：放末端，</text:span><text:span text:style-name="T56">Bubble Up </text:span><text:span text:style-name="T70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9"/>80 <text:s text:c="16"/>8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9"/>/ <text:s/>\ <text:s text:c="15"/>/ <text:s text:c="2"/>\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6"/>70 <text:s text:c="2"/>30 <text:s text:c="3"/>→ <text:s/>70 <text:s text:c="2"/>3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6"/>/ <text:s text:c="18"/>/ <text:s text:c="2"/>\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4"/>10 <text:s text:c="14"/>10 <text:s text:c="2"/>50 ← </text:span><text:span text:style-name="T224">50 </text:span><text:span text:style-name="T225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61"/></text:span><text:span text:style-name="T210">O(log n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Extract-Max</text:span><text:span text:style-name="T70">：</text:span><text:span text:style-name="T104">取出 </text:span><text:span text:style-name="T105">Root=80</text:span><text:span text:style-name="T70">，</text:span><text:span text:style-name="T237">末端</text:span><text:span text:style-name="T70"> </text:span><text:span text:style-name="T56">50 </text:span><text:span text:style-name="T237">補位</text:span><text:span text:style-name="T70">，</text:span><text:span text:style-name="T56">Heapify </text:span><text:span text:style-name="T70">往下交換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9"/>80 <text:s text:c="16"/>50 <text:s text:c="17"/>7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8"/>/ <text:s text:c="2"/>\ <text:s text:c="15"/>/ <text:s text:c="2"/>\ <text:s text:c="16"/>/ <text:s text:c="2"/>\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5"/>70 <text:s text:c="2"/>30 <text:s text:c="2"/>→ <text:s text:c="3"/>70 <text:s text:c="2"/>30 <text:s text:c="3"/>→ <text:s text:c="3"/>50 <text:s text:c="2"/>3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5"/>/ <text:s text:c="2"/>\ <text:s text:c="15"/>/ <text:s text:c="20"/>/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2"/>10 <text:s text:c="2"/>50 <text:s text:c="9"/>10 <text:s text:c="18"/>1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3"/></text:span><text:span text:style-name="T70">取出 </text:span><text:span text:style-name="T56">80 <text:s text:c="5"/>50 </text:span><text:span text:style-name="T70">移到 </text:span><text:span text:style-name="T56">Root <text:s text:c="4"/>Heapify </text:span><text:span text:style-name="T70">完成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1"><text:span text:style-name="T56"><text:s text:c="57"/></text:span><text:span text:style-name="T210">O(log n)</text:span></text:p>
          </table:table-cell>
        </table:table-row>
      </table:table>
      <text:p text:style-name="P1"/>
      <text:h text:style-name="P3" text:outline-level="1" loext:marker-style-name="T244"><text:soft-page-break/><text:span text:style-name="T245">七、</text:span><text:span text:style-name="T244">Interval Heap</text:span><text:span text:style-name="T245">（區間堆積）【</text:span><text:span text:style-name="T244">110</text:span><text:span text:style-name="T245">地</text:span><text:span text:style-name="T244">Q4</text:span><text:span text:style-name="T245">】</text:span></text:h>
      <text:h text:style-name="P4" text:outline-level="2" loext:marker-style-name="T20"><text:span text:style-name="T20">7-1 <text:s/></text:span><text:span text:style-name="T21">問題起源：</text:span><text:span text:style-name="T22">普通 </text:span><text:span text:style-name="T23">Heap</text:span><text:span text:style-name="T20"> </text:span><text:span text:style-name="T221">只能快速取一端</text:span></text:h>
      <text:p text:style-name="P5" loext:marker-style-name="T248"><text:span text:style-name="T249">回顧你已學過的 </text:span><text:span text:style-name="T248">Max Heap</text:span><text:span text:style-name="T249">：</text:span></text:p>
      <text:p text:style-name="P37" loext:marker-style-name="T264"><text:span text:style-name="T264"><text:s text:c="11"/>100 <text:s text:c="6"/>← </text:span><text:span text:style-name="T265">Root</text:span><text:span text:style-name="T264"> = 全域最大值（</text:span><text:span text:style-name="T265">O(1) 取得</text:span><text:span text:style-name="T264">）</text:span></text:p>
      <text:p text:style-name="P6"><text:span text:style-name="T264"><text:s text:c="10"/>/ <text:s text:c="3"/>\</text:span></text:p>
      <text:p text:style-name="P6" loext:marker-style-name="T264"><text:span text:style-name="T264"><text:s text:c="8"/>90 <text:s text:c="5"/>80</text:span><text:span text:style-name="T264"/></text:p>
      <text:p text:style-name="P6" loext:marker-style-name="T264"><text:span text:style-name="T264"><text:s text:c="7"/>/ <text:s/>\</text:span><text:span text:style-name="T264"/></text:p>
      <text:p text:style-name="P6" loext:marker-style-name="T264"><text:span text:style-name="T264"><text:s text:c="6"/>70 <text:s text:c="2"/>60</text:span><text:span text:style-name="T264"/></text:p>
      <text:p text:style-name="P6"/>
      <text:p text:style-name="P6" loext:marker-style-name="T264"><text:span text:style-name="T264"><text:s text:c="2"/>Find-Max <text:s/>= O(1) <text:s/>直接</text:span><text:span text:style-name="T265">看 Root</text:span></text:p>
      <text:p text:style-name="P39" loext:marker-style-name="T264"><text:span text:style-name="T264"><text:s text:c="2"/></text:span><text:span text:style-name="T110">Find-Min <text:s/>= O(n)</text:span><text:span text:style-name="T264"> <text:s/></text:span><text:span text:style-name="T267">最小值藏在某個葉節點，不知在哪，</text:span><text:span text:style-name="T241">只能全掃</text:span></text:p>
      <text:p text:style-name="P7"/>
      <text:p text:style-name="P5" loext:marker-style-name="T248"><text:span text:style-name="T248">Max Heap </text:span><text:span text:style-name="T249">有一個致命弱點：</text:span></text:p>
      <text:list text:style-name="WWNum14">
        <text:list-item>
          <text:p text:style-name="P28" loext:marker-style-name="T248"><text:span text:style-name="T249">取最大值 → </text:span><text:span text:style-name="T248">O(1)</text:span><text:span text:style-name="T249">，非常快，因為 </text:span><text:span text:style-name="T248">Root </text:span><text:span text:style-name="T249">就是最大值。</text:span></text:p>
        </text:list-item>
        <text:list-item>
          <text:p text:style-name="P28" loext:marker-style-name="T248"><text:span text:style-name="T102">取最小值 → </text:span><text:span text:style-name="T103">O(n)</text:span><text:span text:style-name="T249">，</text:span><text:span text:style-name="T123">非常慢，因為最小值可能藏在任何一個葉節點，沒有規律可循。</text:span></text:p>
        </text:list-item>
      </text:list>
      <text:p text:style-name="P7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" loext:marker-style-name="T250"><text:span text:style-name="T250">❓ </text:span><text:span text:style-name="T251">想一想：最小值在哪裡？</text:span></text:p>
            <text:p text:style-name="P7" loext:marker-style-name="T259"><text:span text:style-name="T260">以上面的 </text:span><text:span text:style-name="T259">Max Heap </text:span><text:span text:style-name="T260">為例，最小值 </text:span><text:span text:style-name="T259">60 </text:span><text:span text:style-name="T260">藏在葉節點。</text:span></text:p>
            <text:p text:style-name="P41" loext:marker-style-name="T259"><text:span text:style-name="T260">如果樹有 </text:span><text:span text:style-name="T259">n </text:span><text:span text:style-name="T260">個節點，不掃到最後一層根本不知道最小值在哪。</text:span></text:p>
          </table:table-cell>
        </table:table-row>
      </table:table>
      <text:p text:style-name="P8"/>
      <text:h text:style-name="P4" text:outline-level="2" loext:marker-style-name="T20"><text:span text:style-name="T20">7-2 <text:s/></text:span><text:span text:style-name="T22">現實需求</text:span><text:span text:style-name="T21">：</text:span><text:span text:style-name="T221">兩端都要快</text:span></text:h>
      <text:p text:style-name="P5" loext:marker-style-name="T248"><text:span text:style-name="T249">在</text:span><text:span text:style-name="T252">很多實際應用中</text:span><text:span text:style-name="T249">，我們</text:span><text:span text:style-name="T173">同時需要快速取出最大值和最小值</text:span><text:span text:style-name="T249">：</text:span></text:p>
      <text:p text:style-name="P7"/>
      <text:p text:style-name="P37" loext:marker-style-name="T264"><text:span text:style-name="T264"><text:s text:c="2"/>📈 股票交易系統：</text:span><text:span text:style-name="T264"/></text:p>
      <text:p text:style-name="P6" loext:marker-style-name="T264"><text:span text:style-name="T264"><text:s text:c="7"/>→ 最高價（最大值）O(1) 快速取得</text:span><text:span text:style-name="T264"/></text:p>
      <text:p text:style-name="P6" loext:marker-style-name="T264"><text:span text:style-name="T264"><text:s text:c="7"/>→ 最低價（最小值）O(1) 快速取得</text:span><text:span text:style-name="T264"/></text:p>
      <text:p text:style-name="P6"/>
      <text:p text:style-name="P6" loext:marker-style-name="T264"><text:span text:style-name="T264"><text:s text:c="2"/>🖥️ <text:s/>CPU 排程器（雙優先權模式）：</text:span><text:span text:style-name="T264"/></text:p>
      <text:p text:style-name="P6" loext:marker-style-name="T264"><text:span text:style-name="T264"><text:s text:c="7"/>→ 最高優先權工作 <text:s/>→ 優先執行</text:span><text:span text:style-name="T264"/></text:p>
      <text:p text:style-name="P6" loext:marker-style-name="T264"><text:span text:style-name="T264"><text:s text:c="7"/>→ 最低優先權工作 <text:s/>→ 必要時踢出讓位</text:span><text:span text:style-name="T264"/></text:p>
      <text:p text:style-name="P6"/>
      <text:p text:style-name="P6" loext:marker-style-name="T264"><text:span text:style-name="T264"><text:s text:c="2"/>❌ </text:span><text:span text:style-name="T265">普通 Max Heap</text:span><text:span text:style-name="T264"> 做不到：</text:span><text:span text:style-name="T217">找最小值要</text:span><text:span text:style-name="T241"> O(n)</text:span></text:p>
      <text:p text:style-name="P39" loext:marker-style-name="T264"><text:span text:style-name="T264"><text:s text:c="2"/>❌ </text:span><text:span text:style-name="T265">普通 Min Heap</text:span><text:span text:style-name="T264"> 做不到：</text:span><text:span text:style-name="T217">找最大值要</text:span><text:span text:style-name="T241"> O(n)</text:span></text:p>
      <text:p text:style-name="P7"/>
      <text:p text:style-name="P5" loext:marker-style-name="T248"><text:span text:style-name="T249">這類需求稱為 </text:span><text:span text:style-name="T248">Double-Ended Priority Queue</text:span><text:span text:style-name="T249">（</text:span><text:span text:style-name="T248">DEPQ</text:span><text:span text:style-name="T249">，</text:span><text:span text:style-name="T152">雙端優先佇列</text:span><text:span text:style-name="T249">），</text:span><text:span text:style-name="T123">目標是</text:span><text:span text:style-name="T249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7" loext:marker-style-name="T250"><text:span text:style-name="T250">Extract-Min</text:span><text:span text:style-name="T251">（</text:span><text:span text:style-name="T222">取出最小值</text:span><text:span text:style-name="T251">）</text:span><text:span text:style-name="T250">= </text:span><text:span text:style-name="T223">O(log n)</text:span></text:p>
            <text:p text:style-name="P41" loext:marker-style-name="T250"><text:span text:style-name="T250">Extract-Max</text:span><text:span text:style-name="T251">（</text:span><text:span text:style-name="T222">取出最大值</text:span><text:span text:style-name="T251">）</text:span><text:span text:style-name="T250">= </text:span><text:span text:style-name="T223">O(log n)</text:span></text:p>
          </table:table-cell>
        </table:table-row>
      </table:table>
      <text:p text:style-name="P8"/>
      <text:h text:style-name="P4" text:outline-level="2" loext:marker-style-name="T20"><text:soft-page-break/><text:span text:style-name="T20">7-3 <text:s/>Interval Heap </text:span><text:span text:style-name="T21">的核心設計</text:span></text:h>
      <text:p text:style-name="P5" loext:marker-style-name="T248"><text:span text:style-name="T254">Interval Heap </text:span><text:span text:style-name="T255">的靈感</text:span><text:span text:style-name="T249">：</text:span><text:span text:style-name="T123">把 </text:span><text:span text:style-name="T124">Min Heap </text:span><text:span text:style-name="T123">和 </text:span><text:span text:style-name="T124">Max Heap</text:span><text:span text:style-name="T232">「疊」在同一棵樹上</text:span><text:span text:style-name="T249">。</text:span></text:p>
      <text:p text:style-name="P5" loext:marker-style-name="T248"><text:span text:style-name="T261">具體做法：</text:span><text:span text:style-name="T214">每個節點不再存一個值</text:span><text:span text:style-name="T249">，</text:span><text:span text:style-name="T173">改成存一個「區間」</text:span><text:span text:style-name="T174">[min_val, max_val]</text:span><text:span text:style-name="T249">：</text:span></text:p>
      <text:p text:style-name="P37" loext:marker-style-name="T264"><text:span text:style-name="T264"><text:s text:c="2"/></text:span><text:span text:style-name="T266">普通</text:span><text:span text:style-name="T264"> Heap 節點： <text:s text:c="9"/>Interval Heap 節點：</text:span></text:p>
      <text:p text:style-name="P6" loext:marker-style-name="T264"><text:span text:style-name="T264"><text:s text:c="7"/></text:span><text:span text:style-name="T265">80</text:span><text:span text:style-name="T264"> <text:s text:c="23"/></text:span><text:span text:style-name="T265">[20, 80]</text:span></text:p>
      <text:p text:style-name="P9"><text:s text:c="34"/>左值 <text:s/>右值</text:p>
      <text:p text:style-name="P6" loext:marker-style-name="T264"><text:span text:style-name="T264"><text:s text:c="30"/>（小的） <text:s/>（大的）</text:span><text:span text:style-name="T264"/></text:p>
      <text:p text:style-name="P6"/>
      <text:p text:style-name="P39" loext:marker-style-name="T264"><text:span text:style-name="T264"><text:s text:c="2"/>規則：</text:span><text:span text:style-name="T269">每個節點的 左值 ≤ 右值</text:span><text:span text:style-name="T270"> </text:span><text:span text:style-name="T264">（必須成立）</text:span></text:p>
      <text:p text:style-name="P7"/>
      <text:p text:style-name="P5" loext:marker-style-name="T248"><text:span text:style-name="T256">兩個 </text:span><text:span text:style-name="T257">Heap </text:span><text:span text:style-name="T256">的同時維護</text:span><text:span text:style-name="T249">：</text:span></text:p>
      <text:list text:continue-numbering="true" text:style-name="WWNum14">
        <text:list-item>
          <text:p text:style-name="P28" loext:marker-style-name="T248"><text:span text:style-name="T252">所有節點的</text:span><text:span text:style-name="T159">左</text:span><text:span text:style-name="T252">值（</text:span><text:span text:style-name="T253">min </text:span><text:span text:style-name="T252">端）</text:span><text:span text:style-name="T249">— 自上而下形成一個 </text:span><text:span text:style-name="T160">Min Heap</text:span></text:p>
        </text:list-item>
        <text:list-item>
          <text:p text:style-name="P28" loext:marker-style-name="T248"><text:span text:style-name="T252">所有節點的</text:span><text:span text:style-name="T185">右</text:span><text:span text:style-name="T252">值（</text:span><text:span text:style-name="T253">max </text:span><text:span text:style-name="T252">端</text:span><text:span text:style-name="T249">）— 自上而下形成一個 </text:span><text:span text:style-name="T186">Max Heap</text:span></text:p>
        </text:list-item>
      </text:list>
      <text:p text:style-name="P7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" loext:marker-style-name="T250"><text:span text:style-name="T250">Interval Heap = </text:span><text:span text:style-name="T161">Min Heap</text:span><text:span text:style-name="T162">（左值）</text:span><text:span text:style-name="T250">+</text:span><text:span text:style-name="T186"> Max Heap</text:span><text:span text:style-name="T187">（右值）</text:span><text:span text:style-name="T271">同時疊在一棵樹上</text:span></text:p>
          </table:table-cell>
        </table:table-row>
      </table:table>
      <text:p text:style-name="P8"/>
      <text:h text:style-name="P4" text:outline-level="2" loext:marker-style-name="T20"><text:span text:style-name="T20">7-4 <text:s/></text:span><text:span text:style-name="T21">整棵樹的結構解析</text:span></text:h>
      <text:p text:style-name="P37" loext:marker-style-name="T264"><text:span text:style-name="T264"><text:s text:c="14"/>[</text:span><text:span text:style-name="T266">10</text:span><text:span text:style-name="T264">, </text:span><text:span text:style-name="T183">100</text:span><text:span text:style-name="T264">] <text:s text:c="9"/>← Root</text:span></text:p>
      <text:p text:style-name="P6" loext:marker-style-name="T264"><text:span text:style-name="T264"><text:s text:c="13"/>/ <text:s text:c="9"/>\</text:span><text:span text:style-name="T264"/></text:p>
      <text:p text:style-name="P39" loext:marker-style-name="T264"><text:span text:style-name="T264"><text:s text:c="8"/>[</text:span><text:span text:style-name="T266">20</text:span><text:span text:style-name="T264">, </text:span><text:span text:style-name="T183">80</text:span><text:span text:style-name="T264">] <text:s text:c="5"/>[</text:span><text:span text:style-name="T266">30</text:span><text:span text:style-name="T264">, </text:span><text:span text:style-name="T183">90</text:span><text:span text:style-name="T264">]</text:span></text:p>
      <text:p text:style-name="P7"/>
      <text:p text:style-name="P5" loext:marker-style-name="T248"><text:span text:style-name="T249">拆開來看左右兩個 </text:span><text:span text:style-name="T248">Heap</text:span><text:span text:style-name="T249">：</text:span></text:p>
      <text:p text:style-name="P37" loext:marker-style-name="T264"><text:span text:style-name="T264"><text:s text:c="2"/></text:span><text:span text:style-name="T268">左值（min 端）形成 Min Heap</text:span><text:span text:style-name="T264">： <text:s text:c="2"/></text:span><text:span text:style-name="T228">右值（max 端）形成 Max Heap</text:span><text:span text:style-name="T264">：</text:span></text:p>
      <text:p text:style-name="P6"/>
      <text:p text:style-name="P6" loext:marker-style-name="T264"><text:span text:style-name="T264"><text:s text:c="10"/>10 <text:s text:c="30"/>100</text:span><text:span text:style-name="T264"/></text:p>
      <text:p text:style-name="P6" loext:marker-style-name="T264"><text:span text:style-name="T264"><text:s text:c="9"/>/ <text:s/>\ <text:s text:c="28"/>/ <text:s text:c="3"/>\</text:span><text:span text:style-name="T264"/></text:p>
      <text:p text:style-name="P6" loext:marker-style-name="T264"><text:span text:style-name="T264"><text:s text:c="8"/>20 <text:s/>30 <text:s text:c="26"/>80 <text:s text:c="4"/>90</text:span><text:span text:style-name="T264"/></text:p>
      <text:p text:style-name="P6"/>
      <text:p text:style-name="P39" loext:marker-style-name="T264"><text:span text:style-name="T264"><text:s text:c="2"/>驗證 Min Heap：10 ≤ 20 ✓ <text:s/>10 ≤ 30 ✓ <text:s text:c="2"/>驗證 Max Heap：100 ≥ 80 ✓ <text:s/>100 ≥ 90 ✓</text:span><text:span text:style-name="T264"/></text:p>
      <text:p text:style-name="P7"/>
      <text:p text:style-name="P5" loext:marker-style-name="T248"><text:span text:style-name="T249">因此：</text:span><text:span text:style-name="T248"/></text:p>
      <text:list text:continue-numbering="true" text:style-name="WWNum14">
        <text:list-item>
          <text:p text:style-name="P28" loext:marker-style-name="T248"><text:span text:style-name="T253">Root </text:span><text:span text:style-name="T252">的</text:span><text:span text:style-name="T159">左</text:span><text:span text:style-name="T252">值</text:span><text:span text:style-name="T249"> </text:span><text:span text:style-name="T248">= </text:span><text:span text:style-name="T163">Min</text:span><text:span text:style-name="T248"> Heap </text:span><text:span text:style-name="T249">的 </text:span><text:span text:style-name="T248">Root = </text:span><text:span text:style-name="T272">全域最小值</text:span><text:span text:style-name="T249"> </text:span><text:span text:style-name="T248">= 10 <text:s/>→ <text:s/>Find-Min = O(1)</text:span></text:p>
        </text:list-item>
        <text:list-item>
          <text:p text:style-name="P28" loext:marker-style-name="T248"><text:span text:style-name="T253">Root </text:span><text:span text:style-name="T252">的</text:span><text:span text:style-name="T185">右</text:span><text:span text:style-name="T252">值</text:span><text:span text:style-name="T249"> </text:span><text:span text:style-name="T248">= </text:span><text:span text:style-name="T188">Max</text:span><text:span text:style-name="T248"> Heap </text:span><text:span text:style-name="T249">的 </text:span><text:span text:style-name="T248">Root = </text:span><text:span text:style-name="T273">全域最大值</text:span><text:span text:style-name="T249"> </text:span><text:span text:style-name="T248">= 100 <text:s/>→ <text:s/>Find-Max = O(1)</text:span></text:p>
        </text:list-item>
      </text:list>
      <text:p text:style-name="P7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7" loext:marker-style-name="T250"><text:span text:style-name="T250">🎯 Interval Heap </text:span><text:span text:style-name="T251">的核心價值</text:span></text:p>
            <text:p text:style-name="P7" loext:marker-style-name="T259"><text:span text:style-name="T175">Root </text:span><text:span text:style-name="T176">節點</text:span><text:span text:style-name="T222">同時持有全域最小值（左值）和全域最大值（右值）</text:span><text:span text:style-name="T260">，</text:span></text:p>
            <text:p text:style-name="P41" loext:marker-style-name="T259"><text:span text:style-name="T258">無論取哪一端</text:span><text:span text:style-name="T260">，</text:span><text:span text:style-name="T123">都能 </text:span><text:span text:style-name="T124">O(1) </text:span><text:span text:style-name="T123">找到、</text:span><text:span text:style-name="T124">O(log n) </text:span><text:span text:style-name="T123">取出。</text:span></text:p>
          </table:table-cell>
        </table:table-row>
      </table:table>
      <text:p text:style-name="P8"/>
      <text:h text:style-name="P16" text:outline-level="2" loext:marker-style-name="T17"><text:soft-page-break/><text:span text:style-name="T18">7-4.5 <text:s/></text:span><text:span text:style-name="T215">Find 找到 vs. Extract 取出</text:span><text:span text:style-name="T18">：</text:span><text:span text:style-name="T233">為何一個 O(1)、一個 O(log n)</text:span><text:span text:style-name="T18">？</text:span></text:h>
      <text:p text:style-name="P32" loext:marker-style-name="T274"><text:span text:style-name="T275">這是很多人第一次接觸 Heap 時最容易混淆的地方。關鍵在於：</text:span><text:span text:style-name="T150">「找到（Find/Peek）」和「取出（Extract/Delete）」是完全不同的兩件事。</text:span></text:p>
      <text:p text:style-name="P8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" loext:marker-style-name="T5"><text:span text:style-name="T14">先用普通 Max Heap 建立直覺</text:span><text:span text:style-name="T5"/></text:p>
          </table:table-cell>
        </table:table-row>
        <table:table-row table:style-name="表格30.1">
          <table:table-cell table:style-name="表格30.A1" office:value-type="string">
            <text:p text:style-name="P2"/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56"><text:s text:c="11"/>100 <text:s text:c="2"/>← Root = 全域最大值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56"><text:s text:c="10"/>/ <text:s text:c="2"/>\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56"><text:s text:c="8"/>90 <text:s text:c="3"/>80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56"><text:s text:c="7"/>/ \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56"><text:s text:c="5"/>70 <text:s/>60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/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56">Find-Max（找最大值）= O(1)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56"><text:s text:c="2"/>→ 直接讀 Root，什麼都不用動。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/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56">Extract-Max（取出最大值）= O(log n)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56"><text:s text:c="2"/>→ </text:span><text:span text:style-name="T224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56"><text:s text:c="4"/>1. </text:span><text:span text:style-name="T276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2" loext:marker-style-name="T41"><text:span text:style-name="T56"><text:s text:c="4"/>2. </text:span><text:span text:style-name="T189">Heap Property（父 ≥ 子）不能違反</text:span></text:p>
          </table:table-cell>
        </table:table-row>
      </table:table>
      <text:p text:style-name="P8"/>
      <text:p text:style-name="P32" loext:marker-style-name="T274"><text:span text:style-name="T136">「取出」的代價遠比「找到」高，是因為</text:span><text:span text:style-name="T235">刪除 Root 後必須完整修復整棵樹的結構。</text:span><text:span text:style-name="T275">流程如下：</text:span></text:p>
      <text:p text:style-name="P8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" loext:marker-style-name="T41"><text:span text:style-name="T56">Extract-Max 完整流程（以上面的 Max Heap 為例）：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Step 1：取出 Root = 10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Step 2：把最後元素（葉節點最右端）60 搬到 Root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<text:s text:c="9"/>60 <text:s text:c="2"/>← 60 補位後，Heap Property 壞掉了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<text:s text:c="7"/>90 <text:s/>8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<text:s text:c="6"/>/</text:span><text:span text:style-name="T41"/></text:p>
          </table:table-cell>
        </table:table-row>
        <text:soft-page-break/>
        <table:table-row table:style-name="表格31.1">
          <table:table-cell table:style-name="表格31.A1" office:value-type="string">
            <text:p text:style-name="P2" loext:marker-style-name="T41"><text:span text:style-name="T56"><text:s text:c="5"/>7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Step 3：60 &lt; 90，違反 Max Heap → 與較大子節點 90 交換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<text:s text:c="9"/>9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<text:s text:c="7"/>60 <text:s/>8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<text:s text:c="6"/>/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<text:s text:c="5"/>7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Step 4：60 &lt; 70，仍違反 → 再往下交換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<text:s text:c="9"/>9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<text:s text:c="7"/>70 <text:s/>8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<text:s text:c="6"/>/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<text:s text:c="5"/>60 <text:s text:c="2"/>← 60 最終落到葉節點，停止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56">這個「一路往下修正」的過程稱為 Heapify Down（向下沉）。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1"><text:span text:style-name="T209">最壞情況需走完整棵樹的高度 h = log₂n</text:span><text:span text:style-name="T56">，因此 </text:span><text:span text:style-name="T236">O(log n)</text:span><text:span text:style-name="T56">。</text:span></text:p>
          </table:table-cell>
        </table:table-row>
      </table:table>
      <text:p text:style-name="P8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2" loext:marker-style-name="T5"><text:span text:style-name="T14">直覺比喻：</text:span><text:span text:style-name="T5"/></text:p>
          </table:table-cell>
        </table:table-row>
        <table:table-row table:style-name="表格32.1">
          <table:table-cell table:style-name="表格32.A1" office:value-type="string">
            <text:p text:style-name="P2"/>
          </table:table-cell>
        </table:table-row>
        <table:table-row table:style-name="表格32.1">
          <table:table-cell table:style-name="表格32.A1" office:value-type="string">
            <text:p text:style-name="P2" loext:marker-style-name="T41"><text:span text:style-name="T56"><text:s text:c="2"/>Find <text:s text:c="2"/>= 看書架最上面那本書 → O(1)，就在眼前，看一眼即可。</text:span><text:span text:style-name="T41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1"><text:span text:style-name="T56"><text:s text:c="2"/></text:span><text:span text:style-name="T57">Extract</text:span><text:span text:style-name="T56"> = </text:span><text:span text:style-name="T219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2" loext:marker-style-name="T41"><text:span text:style-name="T56"><text:s text:c="11"/></text:span><text:span text:style-name="T224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2" loext:marker-style-name="T41"><text:span text:style-name="T56"><text:s text:c="12"/></text:span><text:span text:style-name="T125">這個「整理」的工作量才是 O(log n) 的真正來源。</text:span></text:p>
          </table:table-cell>
        </table:table-row>
      </table:table>
      <text:p text:style-name="P8"/>
      <text:h text:style-name="P16" text:outline-level="2" loext:marker-style-name="T17"><text:span text:style-name="T18">7-4.6 <text:s/>Interval Heap 的 Extract-Min 與 Extract-Max 完整示範</text:span><text:span text:style-name="T17"/></text:h>
      <text:p text:style-name="P32" loext:marker-style-name="T274"><text:span text:style-name="T275">Interval Heap 的 Extract 操作，本質上就是普通 Heap 的 Heapify Down，只是同時維護 Min 端和 Max 端兩條性質。以下用同一棵初始樹，分別展示兩種操作。</text:span><text:span text:style-name="T274"/></text:p>
      <text:p text:style-name="P8"><text:soft-page-break/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" loext:marker-style-name="T5"><text:span text:style-name="T14">初始 Interval Heap：</text:span><text:span text:style-name="T5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1"><text:span text:style-name="T56"><text:s text:c="13"/>[10, 100] <text:s text:c="6"/>← Root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1"><text:span text:style-name="T56"><text:s text:c="12"/>/ <text:s text:c="9"/>\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1"><text:span text:style-name="T56"><text:s text:c="7"/>[20, 80] <text:s text:c="5"/>[30, 90]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1"><text:span text:style-name="T56">左值（min 端）形成 Min Heap： <text:s/>10 ≤ 20，10 ≤ 30 ✓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1"><text:span text:style-name="T56">右值（max 端）形成 Max Heap： <text:s/>100 ≥ 80，100 ≥ 90 ✓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1"><text:span text:style-name="T56">全域最小值 = Root 左值 = 10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1"><text:span text:style-name="T56">全域最大值 = Root 右值 = 100</text:span><text:span text:style-name="T41"/></text:p>
          </table:table-cell>
        </table:table-row>
      </table:table>
      <text:p text:style-name="P8"/>
      <text:h text:style-name="P16" text:outline-level="2" loext:marker-style-name="T17"><text:span text:style-name="T18"><text:s text:c="2"/>一、Extract-Min（</text:span><text:span text:style-name="T19">取出最小值 10</text:span><text:span text:style-name="T18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2" loext:marker-style-name="T41"><text:span text:style-name="T56">Step 1：</text:span><text:span text:style-name="T279">取出 Root 左值（最小值）= 10</text:span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8"/>Root 左側空洞，需要補位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11"/>[ ?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11"/>/ <text:s text:c="7"/>\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6"/>[20, 80] <text:s text:c="3"/>[30, 9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Step 2：補位規則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8"/>把最後節點（[30, 90]）整體移除，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8"/>取其 min 端（30）補到 Root 的左值位置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8"/>（補 min 端修的是 Min Heap；補 max 端修的是 Max Heap）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11"/>[3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11"/>/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6"/>[2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ext:soft-page-break/>
        <table:table-row table:style-name="表格34.1">
          <table:table-cell table:style-name="表格34.A1" office:value-type="string">
            <text:p text:style-name="P2" loext:marker-style-name="T41"><text:span text:style-name="T56">Step 3：檢查 Min Heap 性質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8"/>Root min = 30，Child min = 20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8"/></text:span><text:span text:style-name="T158">30 &gt; 20 → 違反 Min Heap（父 ≤ 子）</text:span><text:span text:style-name="T56">→ </text:span><text:span text:style-name="T128">交換 min 端</text:span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Step 4：Heapify Down（min 端下沉）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11"/>[2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11"/>/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6"/>[3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8"/>20 ≤ 30 → 合法，停止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最終結果：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11"/>[2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11"/>/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<text:s text:c="6"/>[3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1"><text:span text:style-name="T56">成功取出最小值 10，</text:span><text:span text:style-name="T224">Min Heap 與 Max Heap 性質皆完整恢復</text:span><text:span text:style-name="T56">。</text:span></text:p>
          </table:table-cell>
        </table:table-row>
      </table:table>
      <text:p text:style-name="P8"/>
      <text:h text:style-name="P16" text:outline-level="2" loext:marker-style-name="T17"><text:span text:style-name="T18"><text:s text:c="2"/>二、Extract-Max（</text:span><text:span text:style-name="T19">取出最大值 100</text:span><text:span text:style-name="T18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" loext:marker-style-name="T41"><text:span text:style-name="T56">使用同一棵初始樹：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13"/>[10, 10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12"/>/ <text:s text:c="9"/>\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7"/>[20, 80] <text:s text:c="5"/>[3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Step 1：</text:span><text:span text:style-name="T279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8"/>Root 右側空洞，需要補位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11"/>[10, <text:s/>? ]</text:span><text:span text:style-name="T41"/></text:p>
          </table:table-cell>
        </table:table-row>
        <text:soft-page-break/>
        <table:table-row table:style-name="表格35.1">
          <table:table-cell table:style-name="表格35.A1" office:value-type="string">
            <text:p text:style-name="P2" loext:marker-style-name="T41"><text:span text:style-name="T56"><text:s text:c="11"/>/ <text:s text:c="7"/>\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6"/>[20, 80] <text:s text:c="3"/>[3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Step 2：補位規則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8"/>把最後節點（[30, 90]）整體移除，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8"/>取其 max 端（90）補到 Root 的右值位置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11"/>[1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11"/>/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6"/>[20, 8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Step 3：檢查 Max Heap 性質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8"/>Root max = 90，Child max = 80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8"/>90 ≥ 80 → 符合 Max Heap → 無需交換，停止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最終結果：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11"/>[1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11"/>/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<text:s text:c="6"/>[20, 8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1"><text:span text:style-name="T56">成功取出最大值 100，</text:span><text:span text:style-name="T224">結構完整</text:span><text:span text:style-name="T56">。</text:span></text:p>
          </table:table-cell>
        </table:table-row>
      </table:table>
      <text:p text:style-name="P8"/>
      <text:h text:style-name="P16" text:outline-level="2" loext:marker-style-name="T17"><text:span text:style-name="T18"><text:s text:c="2"/>三、Extract-Max 的下沉範例（需多次 Heapify）</text:span><text:span text:style-name="T17"/></text:h>
      <text:p text:style-name="P32" loext:marker-style-name="T274"><text:span text:style-name="T275">上例的 Max Heap 恰好不需要下沉。以下補充一個「確實需要多次下沉」的案例，更能體現 O(log n) 的代價：</text:span><text:span text:style-name="T274"/></text:p>
      <text:p text:style-name="P8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2" loext:marker-style-name="T41"><text:span text:style-name="T56">初始 Interval Heap（5 個節點）：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14"/>[10, 10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8"/>[20, 95] <text:s text:c="5"/>[30, 90]</text:span><text:span text:style-name="T41"/></text:p>
          </table:table-cell>
        </table:table-row>
        <text:soft-page-break/>
        <table:table-row table:style-name="表格36.1">
          <table:table-cell table:style-name="表格36.A1" office:value-type="string">
            <text:p text:style-name="P2" loext:marker-style-name="T41"><text:span text:style-name="T56"><text:s text:c="8"/>/ <text:s text:c="6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3"/>[40, 85] <text:s/>[5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Step 1：取出 Root max = 100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Step 2：最後節點 [50, 70] 移除，取其 max 端 70 補到 Root。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14"/>[1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8"/>[20, 9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3"/>[40, 8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Step 3：Root max = 70，子節點 max：左=95，右=90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8"/>較大子節點 max = 95 &gt; 70 → 違反 Max Heap → 70 與 95 交換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8"/>[20, 70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3"/>[40, 8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Step 4：[20, 70] 的 max = 70，子節點 max：左=85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8"/>85 &gt; 70 → 仍違反 → 70 與 85 交換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8"/>[20, 8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3"/>[4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ext:soft-page-break/>
        <table:table-row table:style-name="表格36.1">
          <table:table-cell table:style-name="表格36.A1" office:value-type="string">
            <text:p text:style-name="P2" loext:marker-style-name="T41"><text:span text:style-name="T56">Step 5：[40, 70] 已是葉節點 → 停止。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最終結果：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8"/>[20, 8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<text:s text:c="3"/>[4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1"><text:span text:style-name="T56">全域最大值已更新為 95。</text:span><text:span text:style-name="T41"/></text:p>
          </table:table-cell>
        </table:table-row>
      </table:table>
      <text:p text:style-name="P8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" loext:marker-style-name="T5"><text:span text:style-name="T14">公職考試必記：Find vs. Extract 時間一覽</text:span><text:span text:style-name="T5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1"><text:span text:style-name="T56"><text:s text:c="2"/>操作 <text:s text:c="14"/>Interval Heap <text:s text:c="3"/>普通 Max Heap <text:s text:c="3"/>普通 Min Heap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1"><text:span text:style-name="T56"><text:s text:c="2"/>Find-Min（找最小） O(1) <text:s/>★ <text:s text:c="9"/>O(n) <text:s text:c="12"/>O(1)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1"><text:span text:style-name="T56"><text:s text:c="2"/>Find-Max（找最大） O(1) <text:s/>★ <text:s text:c="9"/>O(1) <text:s text:c="12"/>O(n)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11"><text:span text:style-name="T280"><text:s text:c="2"/>Extract-Min <text:s text:c="7"/>O(log n) <text:s text:c="9"/></text:span><text:span text:style-name="T277">O(n) </text:span><text:span text:style-name="T280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11"><text:span text:style-name="T280"><text:s text:c="2"/>Extract-Max <text:s text:c="7"/>O(log n) <text:s text:c="9"/>O(log n) <text:s text:c="8"/></text:span><text:span text:style-name="T278">O(n)</text:span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1"><text:span text:style-name="T125">Interval Heap 的兩個 Extract 都是 O(log n)</text:span><text:span text:style-name="T56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2" loext:marker-style-name="T41"><text:span text:style-name="T56">Find 快是因為答案就在 Root；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1"><text:span text:style-name="T239">Extract 要 O(log n) </text:span><text:span text:style-name="T56">是因為</text:span><text:span text:style-name="T236">刪除後必須 Heapify Down 修復結構</text:span><text:span text:style-name="T56">。</text:span></text:p>
          </table:table-cell>
        </table:table-row>
      </table:table>
      <text:p text:style-name="P8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" loext:marker-style-name="T41"><text:span text:style-name="T56">⚠️ <text:s/>常見混淆整理：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1"><text:span text:style-name="T56">「Root 節點同時持有全域最小與最大值，所以 O(1) 找到。」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1"><text:span text:style-name="T56">→ 正確。Find = 讀一個值，完全不修改樹，當然 O(1)。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1"><text:span text:style-name="T56">「Find 都 O(1) 了，Extract 怎麼還要 O(log n)？」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1"><text:span text:style-name="T56">→ 因為</text:span><text:span text:style-name="T210"> Extract 是「刪除 + 修復整棵樹」，不只是讀值。</text:span></text:p>
          </table:table-cell>
        </table:table-row>
        <text:soft-page-break/>
        <table:table-row table:style-name="表格38.1">
          <table:table-cell table:style-name="表格38.A1" office:value-type="string">
            <text:p text:style-name="P2" loext:marker-style-name="T41"><text:span text:style-name="T56"><text:s text:c="2"/>刪除後最後元素補位，再 Heapify Down 重建性質，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1"><text:span text:style-name="T56"><text:s text:c="2"/>最壞走 log n 層 → O(log n)。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1"><text:span text:style-name="T56">記法：Find = 看，不動樹 → O(1)。</text:span><text:span text:style-name="T224">Extract = 拿走，要整理 → O(log n)</text:span><text:span text:style-name="T56">。</text:span></text:p>
          </table:table-cell>
        </table:table-row>
      </table:table>
      <text:p text:style-name="P8"/>
      <text:p text:style-name="P8"/>
      <text:h text:style-name="P4" text:outline-level="2" loext:marker-style-name="T20"><text:span text:style-name="T20">7-5 <text:s/></text:span><text:span text:style-name="T21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281"><text:span text:style-name="T282">操作</text:span><text:span text:style-name="T281"/></text:p>
          </table:table-cell>
          <table:table-cell table:style-name="表格39.A1" office:value-type="string">
            <text:p text:style-name="Standard" loext:marker-style-name="T281"><text:span text:style-name="T281">Interval Heap</text:span><text:span text:style-name="T281"/></text:p>
          </table:table-cell>
          <table:table-cell table:style-name="表格39.A1" office:value-type="string">
            <text:p text:style-name="Standard" loext:marker-style-name="T281"><text:span text:style-name="T282">普通 </text:span><text:span text:style-name="T281">Max Heap</text:span></text:p>
          </table:table-cell>
          <table:table-cell table:style-name="表格39.A1" office:value-type="string">
            <text:p text:style-name="Standard" loext:marker-style-name="T281"><text:span text:style-name="T282">普通 </text:span><text:span text:style-name="T281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62"><text:span text:style-name="T262">Find-Min</text:span><text:span text:style-name="T263">（找最小值）</text:span></text:p>
          </table:table-cell>
          <table:table-cell table:style-name="表格39.A2" office:value-type="string">
            <text:p text:style-name="Standard" loext:marker-style-name="T262"><text:span text:style-name="T262">O(1) ★</text:span><text:span text:style-name="T262"/></text:p>
          </table:table-cell>
          <table:table-cell table:style-name="表格39.A2" office:value-type="string">
            <text:p text:style-name="Standard" loext:marker-style-name="T262"><text:span text:style-name="T262">O(n)</text:span><text:span text:style-name="T262"/></text:p>
          </table:table-cell>
          <table:table-cell table:style-name="表格39.A2" office:value-type="string">
            <text:p text:style-name="Standard" loext:marker-style-name="T262"><text:span text:style-name="T262">O(1)</text:span><text:span text:style-name="T262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62"><text:span text:style-name="T262">Find-Max</text:span><text:span text:style-name="T263">（找最大值）</text:span></text:p>
          </table:table-cell>
          <table:table-cell table:style-name="表格39.A3" office:value-type="string">
            <text:p text:style-name="Standard" loext:marker-style-name="T262"><text:span text:style-name="T262">O(1) ★</text:span><text:span text:style-name="T262"/></text:p>
          </table:table-cell>
          <table:table-cell table:style-name="表格39.A3" office:value-type="string">
            <text:p text:style-name="Standard" loext:marker-style-name="T262"><text:span text:style-name="T262">O(1)</text:span><text:span text:style-name="T262"/></text:p>
          </table:table-cell>
          <table:table-cell table:style-name="表格39.A3" office:value-type="string">
            <text:p text:style-name="Standard" loext:marker-style-name="T262"><text:span text:style-name="T262">O(n)</text:span><text:span text:style-name="T262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62"><text:span text:style-name="T262">Extract-Min</text:span><text:span text:style-name="T263">（取出最小）</text:span></text:p>
          </table:table-cell>
          <table:table-cell table:style-name="表格39.A2" office:value-type="string">
            <text:p text:style-name="Standard" loext:marker-style-name="T262"><text:span text:style-name="T262">O(log n) ★</text:span><text:span text:style-name="T262"/></text:p>
          </table:table-cell>
          <table:table-cell table:style-name="表格39.A2" office:value-type="string">
            <text:p text:style-name="Standard" loext:marker-style-name="T262"><text:span text:style-name="T262">O(n)</text:span><text:span text:style-name="T262"/></text:p>
          </table:table-cell>
          <table:table-cell table:style-name="表格39.A2" office:value-type="string">
            <text:p text:style-name="Standard" loext:marker-style-name="T262"><text:span text:style-name="T262">O(log n)</text:span><text:span text:style-name="T262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62"><text:span text:style-name="T262">Extract-Max</text:span><text:span text:style-name="T263">（取出最大）</text:span></text:p>
          </table:table-cell>
          <table:table-cell table:style-name="表格39.A3" office:value-type="string">
            <text:p text:style-name="Standard" loext:marker-style-name="T262"><text:span text:style-name="T262">O(log n) ★</text:span><text:span text:style-name="T262"/></text:p>
          </table:table-cell>
          <table:table-cell table:style-name="表格39.A3" office:value-type="string">
            <text:p text:style-name="Standard" loext:marker-style-name="T262"><text:span text:style-name="T262">O(log n)</text:span><text:span text:style-name="T262"/></text:p>
          </table:table-cell>
          <table:table-cell table:style-name="表格39.A3" office:value-type="string">
            <text:p text:style-name="Standard" loext:marker-style-name="T262"><text:span text:style-name="T262">O(n)</text:span><text:span text:style-name="T262"/></text:p>
          </table:table-cell>
        </table:table-row>
      </table:table>
      <text:p text:style-name="P5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7" loext:marker-style-name="T250"><text:span text:style-name="T250">⚠️ <text:s/></text:span><text:span text:style-name="T251">普通 </text:span><text:span text:style-name="T250">Min/Max Heap </text:span><text:span text:style-name="T251">各有盲點：</text:span></text:p>
            <text:p text:style-name="P7" loext:marker-style-name="T259"><text:span text:style-name="T102">普通 </text:span><text:span text:style-name="T103">Max Heap </text:span><text:span text:style-name="T102">找最小值 </text:span><text:span text:style-name="T260">→ </text:span><text:span text:style-name="T253">O(n)</text:span><text:span text:style-name="T252">（要掃整棵樹）</text:span></text:p>
            <text:p text:style-name="P7" loext:marker-style-name="T259"><text:span text:style-name="T113">普通 </text:span><text:span text:style-name="T114">Min Heap </text:span><text:span text:style-name="T113">找最大值 </text:span><text:span text:style-name="T260">→ </text:span><text:span text:style-name="T253">O(n)</text:span><text:span text:style-name="T252">（同理）</text:span></text:p>
            <text:p text:style-name="P41" loext:marker-style-name="T259"><text:span text:style-name="T124">Interval Heap </text:span><text:span text:style-name="T123">解決此問題，兩端操作都達到 </text:span><text:span text:style-name="T124">O(log n)</text:span><text:span text:style-name="T260">，這是其最大優勢。</text:span></text:p>
          </table:table-cell>
        </table:table-row>
      </table:table>
      <text:p text:style-name="P8"/>
      <text:h text:style-name="P4" text:outline-level="2" loext:marker-style-name="T20"><text:span text:style-name="T20">7-6 <text:s/>Insert </text:span><text:span text:style-name="T21">操作示範（插入 </text:span><text:span text:style-name="T20">5</text:span><text:span text:style-name="T21">）</text:span></text:h>
      <text:p text:style-name="P5" loext:marker-style-name="T248"><text:span text:style-name="T249">以下示範將數字 </text:span><text:span text:style-name="T248">5 </text:span><text:span text:style-name="T249">插入含 </text:span><text:span text:style-name="T248">{10, 100}, {20, 80}, {30, 90} </text:span><text:span text:style-name="T249">的 </text:span><text:span text:style-name="T248">Interval Heap</text:span><text:span text:style-name="T249">：</text:span></text:p>
      <text:p text:style-name="P37" loext:marker-style-name="T264"><text:span text:style-name="T264">初始： <text:s text:c="10"/>[10, 100]</text:span><text:span text:style-name="T264"/></text:p>
      <text:p text:style-name="P6" loext:marker-style-name="T264"><text:span text:style-name="T264"><text:s text:c="18"/>/ <text:s text:c="7"/>\</text:span><text:span text:style-name="T264"/></text:p>
      <text:p text:style-name="P6" loext:marker-style-name="T264"><text:span text:style-name="T264"><text:s text:c="13"/>[20, 80] <text:s text:c="2"/>[30, 90]</text:span><text:span text:style-name="T264"/></text:p>
      <text:p text:style-name="P6"/>
      <text:p text:style-name="P6" loext:marker-style-name="T264"><text:span text:style-name="T264">Step 1：</text:span><text:span text:style-name="T265">新葉 [5, 5] </text:span><text:span text:style-name="T264">接在 [20, 80] 左子位置</text:span></text:p>
      <text:p text:style-name="P6" loext:marker-style-name="T264"><text:span text:style-name="T264"><text:s text:c="13"/>[10, 100]</text:span><text:span text:style-name="T264"/></text:p>
      <text:p text:style-name="P6" loext:marker-style-name="T264"><text:span text:style-name="T264"><text:s text:c="14"/>/ <text:s text:c="7"/>\</text:span><text:span text:style-name="T264"/></text:p>
      <text:p text:style-name="P6" loext:marker-style-name="T264"><text:span text:style-name="T264"><text:s text:c="9"/>[20, 80] <text:s text:c="2"/>[30, 90]</text:span><text:span text:style-name="T264"/></text:p>
      <text:p text:style-name="P6" loext:marker-style-name="T264"><text:span text:style-name="T264"><text:s text:c="14"/>/</text:span><text:span text:style-name="T264"/></text:p>
      <text:p text:style-name="P6" loext:marker-style-name="T264"><text:span text:style-name="T264"><text:s text:c="11"/>[5, 5] <text:s text:c="2"/>← </text:span><text:span text:style-name="T111">5 &lt; parent.min(20)</text:span><text:span text:style-name="T264">，</text:span><text:span text:style-name="T229">min 端需上浮</text:span></text:p>
      <text:p text:style-name="P6"/>
      <text:p text:style-name="P6" loext:marker-style-name="T264"><text:span text:style-name="T264">Step 2：</text:span><text:span text:style-name="T183">交換 min 端 → [20,80]→[5,80]</text:span><text:span text:style-name="T264">，</text:span><text:span text:style-name="T229">葉→[20,20]</text:span></text:p>
      <text:p text:style-name="P6" loext:marker-style-name="T264"><text:span text:style-name="T264"><text:s text:c="13"/>[10, 100]</text:span><text:span text:style-name="T264"/></text:p>
      <text:p text:style-name="P6" loext:marker-style-name="T264"><text:span text:style-name="T264"><text:s text:c="14"/>/ <text:s text:c="7"/>\</text:span><text:span text:style-name="T264"/></text:p>
      <text:p text:style-name="P6" loext:marker-style-name="T264"><text:span text:style-name="T264"><text:s text:c="10"/>[5, 80] <text:s text:c="2"/>[30, 90] <text:s text:c="2"/>← </text:span><text:span text:style-name="T111">5 &lt; Root.min(10)</text:span><text:span text:style-name="T264">，</text:span><text:span text:style-name="T229">繼續上浮</text:span></text:p>
      <text:p text:style-name="P6" loext:marker-style-name="T264"><text:span text:style-name="T264"><text:s text:c="14"/>/</text:span><text:span text:style-name="T264"/></text:p>
      <text:p text:style-name="P6" loext:marker-style-name="T264"><text:span text:style-name="T264"><text:s text:c="10"/>[20, 20]</text:span><text:span text:style-name="T264"/></text:p>
      <text:p text:style-name="P6"><text:soft-page-break/></text:p>
      <text:p text:style-name="P6" loext:marker-style-name="T264"><text:span text:style-name="T264">Step 3：</text:span><text:span text:style-name="T183">交換 min 端 → Root[10,100]→[5,100]</text:span><text:span text:style-name="T264">，</text:span><text:span text:style-name="T229">[5,80]→[10,80]</text:span></text:p>
      <text:p text:style-name="P6"/>
      <text:p text:style-name="P6" loext:marker-style-name="T264"><text:span text:style-name="T264">最終： <text:s text:c="10"/>[5, 100] <text:s text:c="2"/>← </text:span><text:span text:style-name="T208">全域最小值已更新</text:span></text:p>
      <text:p text:style-name="P6" loext:marker-style-name="T264"><text:span text:style-name="T264"><text:s text:c="18"/>/ <text:s text:c="7"/>\</text:span><text:span text:style-name="T264"/></text:p>
      <text:p text:style-name="P6" loext:marker-style-name="T264"><text:span text:style-name="T264"><text:s text:c="13"/>[10, 80] <text:s text:c="2"/>[30, 90]</text:span><text:span text:style-name="T264"/></text:p>
      <text:p text:style-name="P6" loext:marker-style-name="T264"><text:span text:style-name="T264"><text:s text:c="18"/>/</text:span><text:span text:style-name="T264"/></text:p>
      <text:p text:style-name="P39" loext:marker-style-name="T264"><text:span text:style-name="T264"><text:s text:c="13"/>[20, 20]</text:span><text:span text:style-name="T264"/></text:p>
      <text:p text:style-name="P7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7" loext:marker-style-name="T250"><text:span text:style-name="T250">Insert </text:span><text:span text:style-name="T251">規則：</text:span></text:p>
            <text:p text:style-name="P7" loext:marker-style-name="T259"><text:span text:style-name="T260">新值 </text:span><text:span text:style-name="T259">&lt; </text:span><text:span text:style-name="T260">父節點左值（</text:span><text:span text:style-name="T259">min</text:span><text:span text:style-name="T260">）→ 交換左值，繼續往上（</text:span><text:span text:style-name="T259">min </text:span><text:span text:style-name="T260">端上浮）</text:span></text:p>
            <text:p text:style-name="P7" loext:marker-style-name="T259"><text:span text:style-name="T260">新值 </text:span><text:span text:style-name="T259">&gt; </text:span><text:span text:style-name="T260">父節點右值（</text:span><text:span text:style-name="T259">max</text:span><text:span text:style-name="T260">）→ 交換右值，繼續往上（</text:span><text:span text:style-name="T259">max </text:span><text:span text:style-name="T260">端上浮）</text:span></text:p>
            <text:p text:style-name="P41" loext:marker-style-name="T259"><text:span text:style-name="T260">新值介於父節點 </text:span><text:span text:style-name="T259">[min, max] </text:span><text:span text:style-name="T260">之間 → 合法，停止</text:span></text:p>
          </table:table-cell>
        </table:table-row>
      </table:table>
      <text:h text:style-name="P3" text:outline-level="1"><text:span text:style-name="T245">八、合併兩個 </text:span><text:span text:style-name="T244">Heap</text:span><text:span text:style-name="T245">（</text:span><text:span text:style-name="T244">Merge Heap</text:span><text:span text:style-name="T245">）【</text:span><text:span text:style-name="T244">111</text:span><text:span text:style-name="T245">地</text:span><text:span text:style-name="T244">Q4</text:span><text:span text:style-name="T245">】</text:span></text:h>
      <text:h text:style-name="P4" text:outline-level="2" loext:marker-style-name="T20"><text:span text:style-name="T20">8-1 <text:s/></text:span><text:span text:style-name="T21">問題起源：普通 </text:span><text:span text:style-name="T20">Heap </text:span><text:span text:style-name="T21">合併需要 </text:span><text:span text:style-name="T20">O(n+m)</text:span></text:h>
      <text:p text:style-name="P5" loext:marker-style-name="T248"><text:span text:style-name="T249">假設現在有兩個 </text:span><text:span text:style-name="T248">Max Heap A </text:span><text:span text:style-name="T249">和 </text:span><text:span text:style-name="T248">B</text:span><text:span text:style-name="T249">，你想把它們合併成一個新的 </text:span><text:span text:style-name="T248">Max Heap</text:span><text:span text:style-name="T249">：</text:span></text:p>
      <text:p text:style-name="P37" loext:marker-style-name="T264"><text:span text:style-name="T264"><text:s text:c="2"/>Heap A： <text:s text:c="9"/>Heap B： <text:s text:c="9"/>合併目標：</text:span><text:span text:style-name="T264"/></text:p>
      <text:p text:style-name="P6" loext:marker-style-name="T264"><text:span text:style-name="T264"><text:s text:c="7"/>90 <text:s text:c="15"/>95 <text:s text:c="16"/>95</text:span><text:span text:style-name="T264"/></text:p>
      <text:p text:style-name="P6" loext:marker-style-name="T264"><text:span text:style-name="T264"><text:s text:c="6"/>/ <text:s/>\ <text:s text:c="13"/>/ <text:s/>\ <text:s text:c="14"/>/ <text:s text:c="3"/>\</text:span><text:span text:style-name="T264"/></text:p>
      <text:p text:style-name="P6" loext:marker-style-name="T264"><text:span text:style-name="T264"><text:s text:c="5"/>70 <text:s text:c="2"/>80 <text:s text:c="10"/>60 <text:s text:c="2"/>50 <text:s text:c="10"/>90 <text:s text:c="5"/>80</text:span><text:span text:style-name="T264"/></text:p>
      <text:p text:style-name="P6" loext:marker-style-name="T264"><text:span text:style-name="T264"><text:s text:c="40"/>/ <text:s/>\ <text:s text:c="2"/>/</text:span><text:span text:style-name="T264"/></text:p>
      <text:p text:style-name="P39" loext:marker-style-name="T264"><text:span text:style-name="T264"><text:s text:c="39"/>70 <text:s/>60 50</text:span><text:span text:style-name="T264"/></text:p>
      <text:p text:style-name="P7"/>
      <text:p text:style-name="P5" loext:marker-style-name="T248"><text:span text:style-name="T249">普通 </text:span><text:span text:style-name="T248">Binary Heap </text:span><text:span text:style-name="T249">沒有高效的合併方法，通常只能：</text:span></text:p>
      <text:list text:continue-numbering="true" text:style-name="WWNum14">
        <text:list-item>
          <text:p text:style-name="P28" loext:marker-style-name="T248"><text:span text:style-name="T249">方法：把 </text:span><text:span text:style-name="T248">A </text:span><text:span text:style-name="T249">和 </text:span><text:span text:style-name="T248">B </text:span><text:span text:style-name="T249">的所有元素倒出來，重新執行 </text:span><text:span text:style-name="T248">Bottom-Up Build Heap</text:span><text:span text:style-name="T249">。</text:span></text:p>
        </text:list-item>
        <text:list-item>
          <text:p text:style-name="P28" loext:marker-style-name="T248"><text:span text:style-name="T249">代價：</text:span><text:span text:style-name="T248">O(n+m)</text:span><text:span text:style-name="T249">，</text:span><text:span text:style-name="T248">n </text:span><text:span text:style-name="T249">和 </text:span><text:span text:style-name="T248">m </text:span><text:span text:style-name="T249">是兩個 </text:span><text:span text:style-name="T248">Heap </text:span><text:span text:style-name="T249">的大小。</text:span></text:p>
        </text:list-item>
      </text:list>
      <text:p text:style-name="P7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7" loext:marker-style-name="T250"><text:span text:style-name="T250">❓ O(n+m) </text:span><text:span text:style-name="T251">有什麼問題？</text:span></text:p>
            <text:p text:style-name="P7" loext:marker-style-name="T259"><text:span text:style-name="T260">對單次合併來說 </text:span><text:span text:style-name="T259">O(n+m) </text:span><text:span text:style-name="T260">尚可接受，但有些系統一天要合併幾十萬次：</text:span></text:p>
            <text:p text:style-name="P7" loext:marker-style-name="T259"><text:span text:style-name="T259"><text:s text:c="2"/>• Event-driven Simulation</text:span><text:span text:style-name="T260">（事件驅動模擬）</text:span></text:p>
            <text:p text:style-name="P7" loext:marker-style-name="T259"><text:span text:style-name="T259"><text:s text:c="2"/>• </text:span><text:span text:style-name="T260">作業系統排程器（</text:span><text:span text:style-name="T259">Scheduler</text:span><text:span text:style-name="T260">）</text:span></text:p>
            <text:p text:style-name="P41" loext:marker-style-name="T259"><text:span text:style-name="T259"><text:s text:c="2"/>• </text:span><text:span text:style-name="T260">分散式工作佇列（</text:span><text:span text:style-name="T259">Distributed Job Queue</text:span><text:span text:style-name="T260">）</text:span></text:p>
          </table:table-cell>
        </table:table-row>
      </table:table>
      <text:p text:style-name="P8"/>
      <text:h text:style-name="P4" text:outline-level="2" loext:marker-style-name="T20"><text:span text:style-name="T20">8-2 <text:s/></text:span><text:span text:style-name="T21">解決方案：把右側路徑弄得很短</text:span></text:h>
      <text:p text:style-name="P5" loext:marker-style-name="T248"><text:span text:style-name="T249">發明者的想法很直接：</text:span><text:span text:style-name="T248"/></text:p>
      <table:table table:name="表格43" table:style-name="表格43">
        <table:table-column table:style-name="表格43.A"/>
        <text:soft-page-break/>
        <table:table-row table:style-name="表格43.1">
          <table:table-cell table:style-name="表格43.A1" office:value-type="string">
            <text:p text:style-name="P7" loext:marker-style-name="T250"><text:span text:style-name="T250">Merge </text:span><text:span text:style-name="T251">只沿右側路徑（</text:span><text:span text:style-name="T250">right path</text:span><text:span text:style-name="T251">）遞迴進行。</text:span></text:p>
            <text:p text:style-name="P7" loext:marker-style-name="T259"><text:span text:style-name="T260">如果右側路徑很短 → </text:span><text:span text:style-name="T259">Merge </text:span><text:span text:style-name="T260">就很快。</text:span></text:p>
            <text:p text:style-name="P41" loext:marker-style-name="T259"><text:span text:style-name="T260">因此：故意把樹弄歪，讓右側路徑保持極短。</text:span><text:span text:style-name="T259"/></text:p>
          </table:table-cell>
        </table:table-row>
      </table:table>
      <text:p text:style-name="P7"/>
      <text:p text:style-name="P37" loext:marker-style-name="T264"><text:span text:style-name="T264"><text:s text:c="2"/>普通 Heap（平衡）： <text:s text:c="11"/>Leftist Heap（故意偏左）：</text:span><text:span text:style-name="T264"/></text:p>
      <text:p text:style-name="P6" loext:marker-style-name="T264"><text:span text:style-name="T264"><text:s text:c="8"/>90 <text:s text:c="29"/>90</text:span><text:span text:style-name="T264"/></text:p>
      <text:p text:style-name="P6" loext:marker-style-name="T264"><text:span text:style-name="T264"><text:s text:c="7"/>/ <text:s/>\ <text:s text:c="27"/>/</text:span><text:span text:style-name="T264"/></text:p>
      <text:p text:style-name="P6" loext:marker-style-name="T264"><text:span text:style-name="T264"><text:s text:c="6"/>80 <text:s text:c="2"/>70 <text:s text:c="24"/>80</text:span><text:span text:style-name="T264"/></text:p>
      <text:p text:style-name="P6" loext:marker-style-name="T264"><text:span text:style-name="T264"><text:s text:c="5"/>/ \ / \ <text:s text:c="24"/>/</text:span><text:span text:style-name="T264"/></text:p>
      <text:p text:style-name="P6" loext:marker-style-name="T264"><text:span text:style-name="T264"><text:s text:c="4"/>60 50 40 30 <text:s text:c="21"/>70</text:span><text:span text:style-name="T264"/></text:p>
      <text:p text:style-name="P6" loext:marker-style-name="T264"><text:span text:style-name="T264"><text:s text:c="36"/>/</text:span><text:span text:style-name="T264"/></text:p>
      <text:p text:style-name="P6" loext:marker-style-name="T264"><text:span text:style-name="T264"><text:s text:c="35"/>60</text:span><text:span text:style-name="T264"/></text:p>
      <text:p text:style-name="P6"/>
      <text:p text:style-name="P39" loext:marker-style-name="T264"><text:span text:style-name="T264"><text:s text:c="2"/>左右差不多，Merge 要走很深 <text:s text:c="5"/>右側路徑只有 1 步！Merge 超快</text:span><text:span text:style-name="T264"/></text:p>
      <text:p text:style-name="P8"/>
      <text:h text:style-name="P4" text:outline-level="2"><text:span text:style-name="T20">8-3 <text:s/>NPL</text:span><text:span text:style-name="T21">（</text:span><text:span text:style-name="T20">Null Path Length</text:span><text:span text:style-name="T21">，空路徑長度）</text:span></text:h>
      <text:p text:style-name="P5" loext:marker-style-name="T248"><text:span text:style-name="T248">NPL </text:span><text:span text:style-name="T249">是「量化右側有多短」的工具。直觀理解：</text:span>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7" loext:marker-style-name="T250"><text:span text:style-name="T250">NPL(node) = </text:span><text:span text:style-name="T251">從該節點出發，走到最近的空節點（</text:span><text:span text:style-name="T250">null</text:span><text:span text:style-name="T251">）所需的步數</text:span></text:p>
            <text:p text:style-name="P41" loext:marker-style-name="T259"><text:span text:style-name="T259">NPL(null) = -1 <text:s/></text:span><text:span text:style-name="T260">（空節點本身的定義）</text:span></text:p>
          </table:table-cell>
        </table:table-row>
      </table:table>
      <text:p text:style-name="P7"/>
      <text:p text:style-name="P5" loext:marker-style-name="T248"><text:span text:style-name="T249">公式：</text:span><text:span text:style-name="T248">NPL(node) = 1 + min( NPL(</text:span><text:span text:style-name="T249">左子</text:span><text:span text:style-name="T248">), NPL(</text:span><text:span text:style-name="T249">右子</text:span><text:span text:style-name="T248">) )</text:span></text:p>
      <text:p text:style-name="P7"/>
      <text:p text:style-name="P42" loext:marker-style-name="T246"><text:span text:style-name="T246">NPL </text:span><text:span text:style-name="T247">計算範例</text:span></text:p>
      <text:p text:style-name="P37" loext:marker-style-name="T264"><text:span text:style-name="T264"><text:s text:c="14"/>3 <text:s text:c="11"/>← 算 NPL</text:span><text:span text:style-name="T264"/></text:p>
      <text:p text:style-name="P6" loext:marker-style-name="T264"><text:span text:style-name="T264"><text:s text:c="13"/>/ \</text:span><text:span text:style-name="T264"/></text:p>
      <text:p text:style-name="P6" loext:marker-style-name="T264"><text:span text:style-name="T264"><text:s text:c="12"/>5 <text:s text:c="2"/>8</text:span><text:span text:style-name="T264"/></text:p>
      <text:p text:style-name="P6" loext:marker-style-name="T264"><text:span text:style-name="T264"><text:s text:c="11"/>/ \</text:span><text:span text:style-name="T264"/></text:p>
      <text:p text:style-name="P6" loext:marker-style-name="T264"><text:span text:style-name="T264"><text:s text:c="10"/>9 <text:s text:c="2"/>7</text:span><text:span text:style-name="T264"/></text:p>
      <text:p text:style-name="P6"/>
      <text:p text:style-name="P6" loext:marker-style-name="T264"><text:span text:style-name="T264"><text:s text:c="2"/>計算（由葉往根）：</text:span><text:span text:style-name="T264"/></text:p>
      <text:p text:style-name="P6" loext:marker-style-name="T264"><text:span text:style-name="T264"><text:s text:c="4"/>NPL(9) = 1 + min(-1,-1) = 0 <text:s text:c="2"/>（葉節點，兩側皆空）</text:span><text:span text:style-name="T264"/></text:p>
      <text:p text:style-name="P6" loext:marker-style-name="T264"><text:span text:style-name="T264"><text:s text:c="4"/>NPL(7) = 0 <text:s text:c="20"/>（同上）</text:span><text:span text:style-name="T264"/></text:p>
      <text:p text:style-name="P6" loext:marker-style-name="T264"><text:span text:style-name="T264"><text:s text:c="4"/>NPL(8) = 0 <text:s text:c="20"/>（葉節點）</text:span><text:span text:style-name="T264"/></text:p>
      <text:p text:style-name="P6" loext:marker-style-name="T264"><text:span text:style-name="T264"><text:s text:c="4"/>NPL(5) = 1 + min(NPL(9),NPL(7)) = 1+min(0,0) = 1</text:span><text:span text:style-name="T264"/></text:p>
      <text:p text:style-name="P39" loext:marker-style-name="T264"><text:span text:style-name="T264"><text:s text:c="4"/>NPL(3) = 1 + min(NPL(5),NPL(8)) = 1+min(1,0) = 1</text:span><text:span text:style-name="T264"/></text:p>
      <text:p text:style-name="P8"/>
      <text:h text:style-name="P4" text:outline-level="2" loext:marker-style-name="T20"><text:span text:style-name="T20">8-4 <text:s/></text:span><text:span text:style-name="T21">左偏性質（</text:span><text:span text:style-name="T20">Leftist Property</text:span><text:span text:style-name="T21">）</text:span></text:h>
      <text:p text:style-name="P5" loext:marker-style-name="T248"><text:span text:style-name="T248">Leftist Heap </text:span><text:span text:style-name="T249">對每個節點加一條規定：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7" loext:marker-style-name="T250"><text:span text:style-name="T251">每個節點：</text:span><text:span text:style-name="T250">NPL</text:span><text:span text:style-name="T251">（左子樹）≥ </text:span><text:span text:style-name="T250">NPL</text:span><text:span text:style-name="T251">（右子樹）</text:span></text:p>
            <text:p text:style-name="P41" loext:marker-style-name="T259"><text:span text:style-name="T260">意思：左邊一定比右邊「深」或「一樣深」→ 右側路徑一定是最短路徑。</text:span><text:span text:style-name="T259"/></text:p>
          </table:table-cell>
        </table:table-row>
      </table:table>
      <text:p text:style-name="P7"><text:soft-page-break/></text:p>
      <text:p text:style-name="P5" loext:marker-style-name="T248"><text:span text:style-name="T249">這個規定保證了：</text:span><text:span text:style-name="T248"/></text:p>
      <text:list text:continue-numbering="true" text:style-name="WWNum14">
        <text:list-item>
          <text:p text:style-name="P28" loext:marker-style-name="T248"><text:span text:style-name="T249">右側路徑長度 ≤ </text:span><text:span text:style-name="T248">log(n+1) <text:s/></text:span><text:span text:style-name="T249">（即使整棵樹有 </text:span><text:span text:style-name="T248">n </text:span><text:span text:style-name="T249">個節點，右路徑也不超過 </text:span><text:span text:style-name="T248">log n </text:span><text:span text:style-name="T249">步）</text:span></text:p>
        </text:list-item>
        <text:list-item>
          <text:p text:style-name="P28" loext:marker-style-name="T248"><text:span text:style-name="T248">Merge </text:span><text:span text:style-name="T249">沿右路徑進行 → 深度 ≤ </text:span><text:span text:style-name="T248">log n → </text:span><text:span text:style-name="T249">時間 </text:span><text:span text:style-name="T248">O(log n)</text:span></text:p>
        </text:list-item>
      </text:list>
      <text:p text:style-name="P7"/>
      <text:p text:style-name="P42" loext:marker-style-name="T246"><text:span text:style-name="T247">上面範例的左偏驗證</text:span><text:span text:style-name="T246"/></text:p>
      <text:p text:style-name="P37" loext:marker-style-name="T264"><text:span text:style-name="T264"><text:s text:c="2"/>節點 3：NPL(左=5) = 1 <text:s/>≥ <text:s/>NPL(右=8) = 0 <text:s text:c="2"/>✓ 左偏</text:span><text:span text:style-name="T264"/></text:p>
      <text:p text:style-name="P6" loext:marker-style-name="T264"><text:span text:style-name="T264"><text:s text:c="2"/>節點 5：NPL(左=9) = 0 <text:s/>≥ <text:s/>NPL(右=7) = 0 <text:s text:c="2"/>✓ 左偏（相等也算）</text:span><text:span text:style-name="T264"/></text:p>
      <text:p text:style-name="P6"/>
      <text:p text:style-name="P39" loext:marker-style-name="T264"><text:span text:style-name="T264">→ 此樹是合法的 Min Leftist Heap ✓</text:span><text:span text:style-name="T264"/></text:p>
      <text:p text:style-name="P8"/>
      <text:h text:style-name="P4" text:outline-level="2"><text:span text:style-name="T20">8-5 <text:s/>Merge </text:span><text:span text:style-name="T21">演算法（以 </text:span><text:span text:style-name="T20">Min Leftist Heap </text:span><text:span text:style-name="T21">為例）</text:span></text:h>
      <text:p text:style-name="P5" loext:marker-style-name="T248"><text:span text:style-name="T249">只有四個步驟，每次都沿右側路徑遞迴：</text:span><text:span text:style-name="T248"/></text:p>
      <text:p text:style-name="P37" loext:marker-style-name="T264"><text:span text:style-name="T264"><text:s text:c="2"/>Step 1：比較 A 和 B 的 Root</text:span><text:span text:style-name="T264"/></text:p>
      <text:p text:style-name="P6" loext:marker-style-name="T264"><text:span text:style-name="T264"><text:s text:c="11"/>→ 較小的 Root 成為新 Root（Min Heap）</text:span><text:span text:style-name="T264"/></text:p>
      <text:p text:style-name="P6" loext:marker-style-name="T264"><text:span text:style-name="T264"><text:s text:c="11"/>→ 較大的 Root 成為另一個子樹（稱為 b）</text:span><text:span text:style-name="T264"/></text:p>
      <text:p text:style-name="P6"/>
      <text:p text:style-name="P6" loext:marker-style-name="T264"><text:span text:style-name="T264"><text:s text:c="2"/>Step 2：遞迴合併「新 Root 的右子樹」與「b」</text:span><text:span text:style-name="T264"/></text:p>
      <text:p text:style-name="P6" loext:marker-style-name="T264"><text:span text:style-name="T264"><text:s text:c="11"/>→ Merge(newRoot.right, b)</text:span><text:span text:style-name="T264"/></text:p>
      <text:p text:style-name="P6"/>
      <text:p text:style-name="P6" loext:marker-style-name="T264"><text:span text:style-name="T264"><text:s text:c="2"/>Step 3：合併完後，若 NPL(右子樹) &gt; NPL(左子樹)</text:span><text:span text:style-name="T264"/></text:p>
      <text:p text:style-name="P6" loext:marker-style-name="T264"><text:span text:style-name="T264"><text:s text:c="11"/>→ 交換左右子樹，恢復左偏性質</text:span><text:span text:style-name="T264"/></text:p>
      <text:p text:style-name="P6"/>
      <text:p text:style-name="P39" loext:marker-style-name="T264"><text:span text:style-name="T264"><text:s text:c="2"/>Step 4：更新 NPL 值</text:span><text:span text:style-name="T264"/></text:p>
      <text:p text:style-name="P7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7" loext:marker-style-name="T250"><text:span text:style-name="T251">為什麼只走右側路徑？</text:span><text:span text:style-name="T250"/></text:p>
            <text:p text:style-name="P7" loext:marker-style-name="T259"><text:span text:style-name="T259">Merge </text:span><text:span text:style-name="T260">每次遞迴都只取「右子樹」→ 路徑深度 </text:span><text:span text:style-name="T259">= </text:span><text:span text:style-name="T260">右側路徑長度 ≤ </text:span><text:span text:style-name="T259">log n</text:span><text:span text:style-name="T260">。</text:span></text:p>
            <text:p text:style-name="P41" loext:marker-style-name="T259"><text:span text:style-name="T260">左側路徑完全不碰，保持不變。</text:span><text:span text:style-name="T259"/></text:p>
          </table:table-cell>
        </table:table-row>
      </table:table>
      <text:p text:style-name="P8"/>
      <text:h text:style-name="P4" text:outline-level="2" loext:marker-style-name="T20"><text:span text:style-name="T20">8-6 <text:s/>Merge </text:span><text:span text:style-name="T21">完整範例</text:span></text:h>
      <text:p text:style-name="P37" loext:marker-style-name="T264"><text:span text:style-name="T264"><text:s text:c="2"/>Heap A（NPL=1）： <text:s text:c="5"/>Heap B（NPL=1）：</text:span><text:span text:style-name="T264"/></text:p>
      <text:p text:style-name="P6" loext:marker-style-name="T264"><text:span text:style-name="T264"><text:s text:c="10"/>3 <text:s text:c="21"/>6</text:span><text:span text:style-name="T264"/></text:p>
      <text:p text:style-name="P6" loext:marker-style-name="T264"><text:span text:style-name="T264"><text:s text:c="9"/>/ \ <text:s text:c="18"/>/ \</text:span><text:span text:style-name="T264"/></text:p>
      <text:p text:style-name="P6" loext:marker-style-name="T264"><text:span text:style-name="T264"><text:s text:c="8"/>5 <text:s text:c="2"/>8 <text:s text:c="15"/>12 <text:s text:c="2"/>7</text:span><text:span text:style-name="T264"/></text:p>
      <text:p text:style-name="P6"/>
      <text:p text:style-name="P6" loext:marker-style-name="T264"><text:span text:style-name="T264"><text:s text:c="2"/>Step 1：3 &lt; 6 → 3 為新 Root，遞迴 Merge(A.right=8, B=6)</text:span><text:span text:style-name="T264"/></text:p>
      <text:p text:style-name="P6"/>
      <text:p text:style-name="P6" loext:marker-style-name="T264"><text:span text:style-name="T264"><text:s text:c="2"/>Step 2：Merge(8, 6)：6 &lt; 8 → 6 為新 Root，遞迴 Merge(B.right=7, 8)</text:span><text:span text:style-name="T264"/></text:p>
      <text:p text:style-name="P6"/>
      <text:p text:style-name="P6" loext:marker-style-name="T264"><text:span text:style-name="T264"><text:s text:c="2"/>Step 3：Merge(7, 8)：7 &lt; 8 → 7 為新 Root</text:span><text:span text:style-name="T264"/></text:p>
      <text:p text:style-name="P6" loext:marker-style-name="T264"><text:span text:style-name="T264"><text:s text:c="11"/>Merge(null, 8) = 8 <text:s/>→ <text:s/>7.right = 8</text:span><text:span text:style-name="T264"/></text:p>
      <text:p text:style-name="P6" loext:marker-style-name="T264"><text:span text:style-name="T264"><text:s text:c="11"/>NPL(7.left=null)=-1 &lt; NPL(7.right=8)=0 <text:s/>→ <text:s/>交換左右！</text:span><text:span text:style-name="T264"/></text:p>
      <text:p text:style-name="P6" loext:marker-style-name="T264"><text:span text:style-name="T264"><text:s text:c="11"/>結果：7.left=8, 7.right=null, NPL(7)=0</text:span><text:span text:style-name="T264"/></text:p>
      <text:p text:style-name="P6" loext:marker-style-name="T264"><text:soft-page-break/><text:span text:style-name="T264"><text:s text:c="20"/>7</text:span><text:span text:style-name="T264"/></text:p>
      <text:p text:style-name="P6" loext:marker-style-name="T264"><text:span text:style-name="T264"><text:s text:c="19"/>/</text:span><text:span text:style-name="T264"/></text:p>
      <text:p text:style-name="P6" loext:marker-style-name="T264"><text:span text:style-name="T264"><text:s text:c="18"/>8</text:span><text:span text:style-name="T264"/></text:p>
      <text:p text:style-name="P6"/>
      <text:p text:style-name="P6" loext:marker-style-name="T264"><text:span text:style-name="T264"><text:s text:c="2"/>Step 4：回填 Merge(8,6)：6.left=12, 6.right=7</text:span><text:span text:style-name="T264"/></text:p>
      <text:p text:style-name="P6" loext:marker-style-name="T264"><text:span text:style-name="T264"><text:s text:c="11"/>NPL(12)=0 = NPL(7)=0 <text:s/>→ <text:s/>不需交換</text:span><text:span text:style-name="T264"/></text:p>
      <text:p text:style-name="P6" loext:marker-style-name="T264"><text:span text:style-name="T264"><text:s text:c="11"/>NPL(6) = min(0,0)+1 = 1</text:span><text:span text:style-name="T264"/></text:p>
      <text:p text:style-name="P6" loext:marker-style-name="T264"><text:span text:style-name="T264"><text:s text:c="20"/>6 <text:s/>[NPL=1]</text:span><text:span text:style-name="T264"/></text:p>
      <text:p text:style-name="P6" loext:marker-style-name="T264"><text:span text:style-name="T264"><text:s text:c="19"/>/ \</text:span><text:span text:style-name="T264"/></text:p>
      <text:p text:style-name="P6" loext:marker-style-name="T264"><text:span text:style-name="T264"><text:s text:c="17"/>12 <text:s text:c="2"/>7</text:span><text:span text:style-name="T264"/></text:p>
      <text:p text:style-name="P6" loext:marker-style-name="T264"><text:span text:style-name="T264"><text:s text:c="21"/>/</text:span><text:span text:style-name="T264"/></text:p>
      <text:p text:style-name="P6" loext:marker-style-name="T264"><text:span text:style-name="T264"><text:s text:c="20"/>8</text:span><text:span text:style-name="T264"/></text:p>
      <text:p text:style-name="P6"/>
      <text:p text:style-name="P6" loext:marker-style-name="T264"><text:span text:style-name="T264"><text:s text:c="2"/>Step 5：回填 Merge(A,B)：3.left=5, 3.right=6</text:span><text:span text:style-name="T264"/></text:p>
      <text:p text:style-name="P6" loext:marker-style-name="T264"><text:span text:style-name="T264"><text:s text:c="11"/>NPL(3.right=6)=1 &gt; NPL(3.left=5)=0 <text:s/>→ <text:s/>交換左右！</text:span><text:span text:style-name="T264"/></text:p>
      <text:p text:style-name="P39" loext:marker-style-name="T264"><text:span text:style-name="T264"><text:s text:c="11"/>NPL(3) = min(NPL(6),NPL(5))+1 = min(1,0)+1 = 1</text:span><text:span text:style-name="T264"/></text:p>
      <text:p text:style-name="P12"/>
      <text:p text:style-name="P10"><text:s text:c="2"/>最終合併結果（Min Leftist Heap）：</text:p>
      <text:p text:style-name="P6"/>
      <text:p text:style-name="P6" loext:marker-style-name="T264"><text:span text:style-name="T264"><text:s text:c="14"/>3 <text:s/>[NPL=1]</text:span><text:span text:style-name="T264"/></text:p>
      <text:p text:style-name="P6" loext:marker-style-name="T264"><text:span text:style-name="T264"><text:s text:c="13"/>/ \</text:span><text:span text:style-name="T264"/></text:p>
      <text:p text:style-name="P6" loext:marker-style-name="T264"><text:span text:style-name="T264"><text:s text:c="12"/>6 <text:s text:c="2"/>5 <text:s/>[NPL=0]</text:span><text:span text:style-name="T264"/></text:p>
      <text:p text:style-name="P6" loext:marker-style-name="T264"><text:span text:style-name="T264"><text:s text:c="11"/>/ \</text:span><text:span text:style-name="T264"/></text:p>
      <text:p text:style-name="P6" loext:marker-style-name="T264"><text:span text:style-name="T264"><text:s text:c="9"/>12 <text:s text:c="2"/>7 <text:s/>[NPL=0]</text:span><text:span text:style-name="T264"/></text:p>
      <text:p text:style-name="P6" loext:marker-style-name="T264"><text:span text:style-name="T264"><text:s text:c="13"/>/</text:span><text:span text:style-name="T264"/></text:p>
      <text:p text:style-name="P6" loext:marker-style-name="T264"><text:span text:style-name="T264"><text:s text:c="12"/>8</text:span><text:span text:style-name="T264"/></text:p>
      <text:p text:style-name="P6"/>
      <text:p text:style-name="P6" loext:marker-style-name="T264"><text:span text:style-name="T264"><text:s text:c="2"/>驗證 Min Heap：3&lt;6 ✓ <text:s/>3&lt;5 ✓ <text:s/>6&lt;12 ✓ <text:s/>6&lt;7 ✓ <text:s/>7&lt;8 ✓</text:span><text:span text:style-name="T264"/></text:p>
      <text:p text:style-name="P39" loext:marker-style-name="T264"><text:span text:style-name="T264"><text:s text:c="2"/>驗證左偏性：NPL(6)=1 ≥ NPL(5)=0 ✓ <text:s/>NPL(12)=0 ≥ NPL(7)=0 ✓</text:span><text:span text:style-name="T264"/></text:p>
      <text:p text:style-name="P8"/>
      <text:h text:style-name="P4" text:outline-level="2" loext:marker-style-name="T20"><text:span text:style-name="T20">8-7 <text:s/></text:span><text:span text:style-name="T21">時間複雜度與重點整理</text:span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281"><text:span text:style-name="T282">操作</text:span><text:span text:style-name="T281"/></text:p>
          </table:table-cell>
          <table:table-cell table:style-name="表格47.A1" office:value-type="string">
            <text:p text:style-name="Standard" loext:marker-style-name="T281"><text:span text:style-name="T282">普通 </text:span><text:span text:style-name="T281">Binary Heap</text:span></text:p>
          </table:table-cell>
          <table:table-cell table:style-name="表格47.A1" office:value-type="string">
            <text:p text:style-name="Standard" loext:marker-style-name="T281"><text:span text:style-name="T281">Leftist Heap</text:span><text:span text:style-name="T281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62"><text:span text:style-name="T262">Insert</text:span><text:span text:style-name="T262"/></text:p>
          </table:table-cell>
          <table:table-cell table:style-name="表格47.A2" office:value-type="string">
            <text:p text:style-name="Standard" loext:marker-style-name="T262"><text:span text:style-name="T262">O(log n)</text:span><text:span text:style-name="T262"/></text:p>
          </table:table-cell>
          <table:table-cell table:style-name="表格47.A2" office:value-type="string">
            <text:p text:style-name="Standard" loext:marker-style-name="T262"><text:span text:style-name="T262">O(log n)</text:span><text:span text:style-name="T262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262"><text:span text:style-name="T262">Extract-Min/Max</text:span><text:span text:style-name="T262"/></text:p>
          </table:table-cell>
          <table:table-cell table:style-name="表格47.A3" office:value-type="string">
            <text:p text:style-name="Standard" loext:marker-style-name="T262"><text:span text:style-name="T262">O(log n)</text:span><text:span text:style-name="T262"/></text:p>
          </table:table-cell>
          <table:table-cell table:style-name="表格47.A3" office:value-type="string">
            <text:p text:style-name="Standard" loext:marker-style-name="T262"><text:span text:style-name="T262">O(log n)</text:span><text:span text:style-name="T262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62"><text:span text:style-name="T262">Merge</text:span><text:span text:style-name="T263">（合併兩個 </text:span><text:span text:style-name="T262">Heap</text:span><text:span text:style-name="T263">）</text:span></text:p>
          </table:table-cell>
          <table:table-cell table:style-name="表格47.A2" office:value-type="string">
            <text:p text:style-name="Standard" loext:marker-style-name="T262"><text:span text:style-name="T262">O(n+m) </text:span><text:span text:style-name="T263">重建</text:span></text:p>
          </table:table-cell>
          <table:table-cell table:style-name="表格47.A2" office:value-type="string">
            <text:p text:style-name="Standard" loext:marker-style-name="T262"><text:span text:style-name="T262">O(log n + log m) ★</text:span><text:span text:style-name="T262"/></text:p>
          </table:table-cell>
        </table:table-row>
      </table:table>
      <text:p text:style-name="P5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7" loext:marker-style-name="T250"><text:span text:style-name="T250">⚠️ <text:s/></text:span><text:span text:style-name="T251">重要：</text:span><text:span text:style-name="T250">Min vs. Max Leftist Heap</text:span></text:p>
            <text:p text:style-name="P7" loext:marker-style-name="T259"><text:span text:style-name="T259">Min Leftist Heap → Merge </text:span><text:span text:style-name="T260">時，較小的 </text:span><text:span text:style-name="T259">Root </text:span><text:span text:style-name="T260">成為新 </text:span><text:span text:style-name="T259">Root</text:span></text:p>
            <text:p text:style-name="P7" loext:marker-style-name="T259"><text:span text:style-name="T259">Max Leftist Heap → Merge </text:span><text:span text:style-name="T260">時，較大的 </text:span><text:span text:style-name="T259">Root </text:span><text:span text:style-name="T260">成為新 </text:span><text:span text:style-name="T259">Root</text:span></text:p>
            <text:p text:style-name="P41" loext:marker-style-name="T259"><text:span text:style-name="T260">演算法步驟完全相同，只有「誰當新 </text:span><text:span text:style-name="T259">Root</text:span><text:span text:style-name="T260">」的比較方向相反。</text:span></text:p>
          </table:table-cell>
        </table:table-row>
      </table:table>
      <text:h text:style-name="P15" text:outline-level="1" loext:marker-style-name="T244"/>
      <text:p text:style-name="P1"/>
      <text:h text:style-name="P13" text:outline-level="1" loext:marker-style-name="T3"><text:soft-page-break/><text:span text:style-name="T4">九、</text:span><text:span text:style-name="T10">Heap</text:span><text:span text:style-name="T11"> vs. </text:span><text:span text:style-name="T10">BST / AVL / Red-Black Tree</text:span><text:span text:style-name="T11"> </text:span><text:span text:style-name="T4">深度比較</text:span></text:h>
      <text:p text:style-name="P32" loext:marker-style-name="T29"><text:span text:style-name="T30">這是許多考生最容易混淆的地方，必須徹底釐清各資料結構的設計目的。</text:span><text:span text:style-name="T29"/></text:p>
      <text:p text:style-name="P1"/>
      <text:h text:style-name="P16" text:outline-level="2" loext:marker-style-name="T17"><text:span text:style-name="T18">各結構設計目的一覽</text:span><text:span text:style-name="T17"/></text:h>
      <text:p text:style-name="P1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31" loext:marker-style-name="T5"><text:span text:style-name="T6">結構</text:span><text:span text:style-name="T5"/></text:p>
            </table:table-cell>
            <table:table-cell table:style-name="表格49.A1" office:value-type="string">
              <text:p text:style-name="P31" loext:marker-style-name="T5"><text:span text:style-name="T6">設計目的</text:span><text:span text:style-name="T5"/></text:p>
            </table:table-cell>
            <table:table-cell table:style-name="表格49.A1" office:value-type="string">
              <text:p text:style-name="P31" loext:marker-style-name="T5"><text:span text:style-name="T6">核心保證</text:span><text:span text:style-name="T5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31" loext:marker-style-name="T41"><text:span text:style-name="T56">BST</text:span><text:span text:style-name="T41"/></text:p>
          </table:table-cell>
          <table:table-cell table:style-name="表格49.A2" office:value-type="string">
            <text:p text:style-name="P31" loext:marker-style-name="T41"><text:span text:style-name="T70">快速搜尋特定值</text:span><text:span text:style-name="T41"/></text:p>
          </table:table-cell>
          <table:table-cell table:style-name="表格49.A2" office:value-type="string">
            <text:p text:style-name="P31" loext:marker-style-name="T41"><text:span text:style-name="T70">左 </text:span><text:span text:style-name="T56">&lt; </text:span><text:span text:style-name="T70">根 </text:span><text:span text:style-name="T56">&lt; </text:span><text:span text:style-name="T70">右</text:span></text:p>
          </table:table-cell>
        </table:table-row>
        <table:table-row table:style-name="表格49.1">
          <table:table-cell table:style-name="表格49.A2" office:value-type="string">
            <text:p text:style-name="P31" loext:marker-style-name="T41"><text:span text:style-name="T56">AVL Tree</text:span><text:span text:style-name="T41"/></text:p>
          </table:table-cell>
          <table:table-cell table:style-name="表格49.A2" office:value-type="string">
            <text:p text:style-name="P31" loext:marker-style-name="T41"><text:span text:style-name="T70">平衡 </text:span><text:span text:style-name="T56">BST</text:span><text:span text:style-name="T70">，穩定搜尋</text:span></text:p>
          </table:table-cell>
          <table:table-cell table:style-name="表格49.A2" office:value-type="string">
            <text:p text:style-name="P31" loext:marker-style-name="T41"><text:span text:style-name="T70">高度差 ≤ </text:span><text:span text:style-name="T56">1</text:span><text:span text:style-name="T70">，</text:span><text:span text:style-name="T56">h = O(log n)</text:span></text:p>
          </table:table-cell>
        </table:table-row>
        <table:table-row table:style-name="表格49.1">
          <table:table-cell table:style-name="表格49.A2" office:value-type="string">
            <text:p text:style-name="P31" loext:marker-style-name="T41"><text:span text:style-name="T56">Red-Black Tree</text:span><text:span text:style-name="T41"/></text:p>
          </table:table-cell>
          <table:table-cell table:style-name="表格49.A2" office:value-type="string">
            <text:p text:style-name="P31" loext:marker-style-name="T41"><text:span text:style-name="T70">平衡 </text:span><text:span text:style-name="T56">BST</text:span><text:span text:style-name="T70">，減少旋轉</text:span></text:p>
          </table:table-cell>
          <table:table-cell table:style-name="表格49.A2" office:value-type="string">
            <text:p text:style-name="P31" loext:marker-style-name="T41"><text:span text:style-name="T70">顏色規則，</text:span><text:span text:style-name="T56">h = O(log n)</text:span></text:p>
          </table:table-cell>
        </table:table-row>
        <table:table-row table:style-name="表格49.1">
          <table:table-cell table:style-name="表格49.A2" office:value-type="string">
            <text:p text:style-name="P31" loext:marker-style-name="T41"><text:span text:style-name="T56">Heap</text:span><text:span text:style-name="T41"/></text:p>
          </table:table-cell>
          <table:table-cell table:style-name="表格49.A2" office:value-type="string">
            <text:p text:style-name="P31" loext:marker-style-name="T41"><text:span text:style-name="T70">快速取最大</text:span><text:span text:style-name="T56">/</text:span><text:span text:style-name="T70">最小值</text:span></text:p>
          </table:table-cell>
          <table:table-cell table:style-name="表格49.A2" office:value-type="string">
            <text:p text:style-name="P31" loext:marker-style-name="T41"><text:span text:style-name="T70">父 ≥ 子（</text:span><text:span text:style-name="T56">Max</text:span><text:span text:style-name="T70">）或父 ≤ 子（</text:span><text:span text:style-name="T56">Min</text:span><text:span text:style-name="T70">）</text:span></text:p>
          </table:table-cell>
        </table:table-row>
      </table:table>
      <text:p text:style-name="P1"/>
      <text:h text:style-name="P16" text:outline-level="2" loext:marker-style-name="T17"><text:span text:style-name="T18">時間複雜度全比較</text:span><text:span text:style-name="T17"/></text:h>
      <text:p text:style-name="P1"/>
      <table:table table:name="表格50" table:style-name="表格50">
        <table:table-column table:style-name="表格50.A" table:number-columns-repeated="4"/>
        <table:table-header-rows>
          <table:table-row table:style-name="表格50.1">
            <table:table-cell table:style-name="表格50.A1" office:value-type="string">
              <text:p text:style-name="P31" loext:marker-style-name="T5"><text:span text:style-name="T13">操作</text:span><text:span text:style-name="T5"/></text:p>
            </table:table-cell>
            <table:table-cell table:style-name="表格50.A1" office:value-type="string">
              <text:p text:style-name="P31" loext:marker-style-name="T5"><text:span text:style-name="T14">BST</text:span><text:span text:style-name="T13">（平衡）</text:span><text:span text:style-name="T14">/ AVL / RB</text:span></text:p>
            </table:table-cell>
            <table:table-cell table:style-name="表格50.A1" office:value-type="string">
              <text:p text:style-name="P31" loext:marker-style-name="T5"><text:span text:style-name="T14">Heap</text:span><text:span text:style-name="T5"/></text:p>
            </table:table-cell>
            <table:table-cell table:style-name="表格50.A1" office:value-type="string">
              <text:p text:style-name="P31" loext:marker-style-name="T5"><text:span text:style-name="T13">說明</text:span><text:span text:style-name="T5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31" loext:marker-style-name="T41"><text:span text:style-name="T70">搜尋特定值</text:span><text:span text:style-name="T41"/></text:p>
          </table:table-cell>
          <table:table-cell table:style-name="表格50.A2" office:value-type="string">
            <text:p text:style-name="P31" loext:marker-style-name="T41"><text:span text:style-name="T56">O(log n)</text:span><text:span text:style-name="T41"/></text:p>
          </table:table-cell>
          <table:table-cell table:style-name="表格50.A2" office:value-type="string">
            <text:p text:style-name="P31" loext:marker-style-name="T41"><text:span text:style-name="T56">❌ O(n)</text:span><text:span text:style-name="T41"/></text:p>
          </table:table-cell>
          <table:table-cell table:style-name="表格50.A2" office:value-type="string">
            <text:p text:style-name="P31" loext:marker-style-name="T41"><text:span text:style-name="T56">Heap </text:span><text:span text:style-name="T70">無排序規則</text:span></text:p>
          </table:table-cell>
        </table:table-row>
        <table:table-row table:style-name="表格50.1">
          <table:table-cell table:style-name="表格50.A3" office:value-type="string">
            <text:p text:style-name="P31" loext:marker-style-name="T41"><text:span text:style-name="T70">找最大值（</text:span><text:span text:style-name="T56">view</text:span><text:span text:style-name="T70">）</text:span></text:p>
          </table:table-cell>
          <table:table-cell table:style-name="表格50.A3" office:value-type="string">
            <text:p text:style-name="P31" loext:marker-style-name="T41"><text:span text:style-name="T56">O(log n)</text:span><text:span text:style-name="T41"/></text:p>
          </table:table-cell>
          <table:table-cell table:style-name="表格50.A3" office:value-type="string">
            <text:p text:style-name="P31" loext:marker-style-name="T41"><text:span text:style-name="T56">✅ O(1)</text:span><text:span text:style-name="T41"/></text:p>
          </table:table-cell>
          <table:table-cell table:style-name="表格50.A3" office:value-type="string">
            <text:p text:style-name="P31" loext:marker-style-name="T41"><text:span text:style-name="T56">Heap Root </text:span><text:span text:style-name="T70">即最大值</text:span></text:p>
          </table:table-cell>
        </table:table-row>
        <table:table-row table:style-name="表格50.1">
          <table:table-cell table:style-name="表格50.A2" office:value-type="string">
            <text:p text:style-name="P31" loext:marker-style-name="T41"><text:span text:style-name="T56">Extract-Max</text:span><text:span text:style-name="T41"/></text:p>
          </table:table-cell>
          <table:table-cell table:style-name="表格50.A2" office:value-type="string">
            <text:p text:style-name="P31" loext:marker-style-name="T41"><text:span text:style-name="T56">O(log n)</text:span><text:span text:style-name="T41"/></text:p>
          </table:table-cell>
          <table:table-cell table:style-name="表格50.A2" office:value-type="string">
            <text:p text:style-name="P31" loext:marker-style-name="T41"><text:span text:style-name="T56">O(log n)</text:span><text:span text:style-name="T41"/></text:p>
          </table:table-cell>
          <table:table-cell table:style-name="表格50.A2" office:value-type="string">
            <text:p text:style-name="P31" loext:marker-style-name="T41"><text:span text:style-name="T70">相同</text:span><text:span text:style-name="T41"/></text:p>
          </table:table-cell>
        </table:table-row>
        <table:table-row table:style-name="表格50.1">
          <table:table-cell table:style-name="表格50.A3" office:value-type="string">
            <text:p text:style-name="P31" loext:marker-style-name="T41"><text:span text:style-name="T56">Insert</text:span><text:span text:style-name="T41"/></text:p>
          </table:table-cell>
          <table:table-cell table:style-name="表格50.A3" office:value-type="string">
            <text:p text:style-name="P31" loext:marker-style-name="T41"><text:span text:style-name="T56">O(log n)</text:span><text:span text:style-name="T41"/></text:p>
          </table:table-cell>
          <table:table-cell table:style-name="表格50.A3" office:value-type="string">
            <text:p text:style-name="P31" loext:marker-style-name="T41"><text:span text:style-name="T56">O(log n)</text:span><text:span text:style-name="T41"/></text:p>
          </table:table-cell>
          <table:table-cell table:style-name="表格50.A3" office:value-type="string">
            <text:p text:style-name="P31" loext:marker-style-name="T41"><text:span text:style-name="T70">相同</text:span><text:span text:style-name="T41"/></text:p>
          </table:table-cell>
        </table:table-row>
        <table:table-row table:style-name="表格50.1">
          <table:table-cell table:style-name="表格50.A2" office:value-type="string">
            <text:p text:style-name="P31" loext:marker-style-name="T41"><text:span text:style-name="T56">Delete </text:span><text:span text:style-name="T70">任意</text:span></text:p>
          </table:table-cell>
          <table:table-cell table:style-name="表格50.A2" office:value-type="string">
            <text:p text:style-name="P31" loext:marker-style-name="T41"><text:span text:style-name="T56">O(log n)</text:span><text:span text:style-name="T41"/></text:p>
          </table:table-cell>
          <table:table-cell table:style-name="表格50.A2" office:value-type="string">
            <text:p text:style-name="P31" loext:marker-style-name="T41"><text:span text:style-name="T56">O(n) </text:span><text:span text:style-name="T70">找 </text:span><text:span text:style-name="T56">+ O(log n) </text:span><text:span text:style-name="T70">刪</text:span></text:p>
          </table:table-cell>
          <table:table-cell table:style-name="表格50.A2" office:value-type="string">
            <text:p text:style-name="P31" loext:marker-style-name="T41"><text:span text:style-name="T56">Heap </text:span><text:span text:style-name="T70">找到要刪的節點要 </text:span><text:span text:style-name="T56">O(n)</text:span></text:p>
          </table:table-cell>
        </table:table-row>
      </table:table>
      <text:p text:style-name="P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" loext:marker-style-name="T41"><text:span text:style-name="T56">⚠️ <text:s/></text:span><text:span text:style-name="T70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2" loext:marker-style-name="T41"><text:span text:style-name="T70">「</text:span><text:span text:style-name="T56">Max Heap </text:span><text:span text:style-name="T70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1"><text:span text:style-name="T56">❌ </text:span><text:span text:style-name="T70">錯誤答案：</text:span><text:span text:style-name="T56">O(log n) <text:s/>← </text:span><text:span text:style-name="T70">看到樹就聯想 </text:span><text:span text:style-name="T56">log n </text:span><text:span text:style-name="T70">是常見誤區</text:span></text:p>
          </table:table-cell>
        </table:table-row>
        <table:table-row table:style-name="表格51.1">
          <table:table-cell table:style-name="表格51.A1" office:value-type="string">
            <text:p text:style-name="P2" loext:marker-style-name="T41"><text:span text:style-name="T56">✅ </text:span><text:span text:style-name="T70">正確答案：</text:span><text:span text:style-name="T56">O(n)</text:span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1"><text:span text:style-name="T70">原因：</text:span><text:span text:style-name="T56">Heap </text:span><text:span text:style-name="T70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2" loext:marker-style-name="T41"><text:span text:style-name="T56"><text:s text:c="6"/></text:span><text:span text:style-name="T70">最壞情況需掃描所有節點。</text:span></text:p>
          </table:table-cell>
        </table:table-row>
      </table:table>
      <text:p text:style-name="P1"/>
      <text:h text:style-name="P16" text:outline-level="2" loext:marker-style-name="T17"><text:soft-page-break/><text:span text:style-name="T18">為什麼 </text:span><text:span text:style-name="T25">Linux</text:span><text:span text:style-name="T26"> </text:span><text:span text:style-name="T18">選擇 </text:span><text:span text:style-name="T25">Red-Black Tree</text:span><text:span text:style-name="T26"> </text:span><text:span text:style-name="T18">而非 </text:span><text:span text:style-name="T25">AVL</text:span><text:span text:style-name="T18">？</text:span></text:h>
      <text:list text:continue-list="list1695230943" text:style-name="WWNum2">
        <text:list-item>
          <text:p text:style-name="P35" loext:marker-style-name="T29"><text:span text:style-name="T55">AVL</text:span><text:span text:style-name="T30">：搜尋最快，但插入</text:span><text:span text:style-name="T55">/</text:span><text:span text:style-name="T30">刪除旋轉次數多，修改成本高。</text:span></text:p>
        </text:list-item>
        <text:list-item>
          <text:p text:style-name="P35" loext:marker-style-name="T29"><text:span text:style-name="T55">Red-Black Tree</text:span><text:span text:style-name="T30">：搜尋稍慢，但插入</text:span><text:span text:style-name="T55">/</text:span><text:span text:style-name="T30">刪除旋轉較少，整體效能均衡。</text:span></text:p>
        </text:list-item>
        <text:list-item>
          <text:p text:style-name="P35" loext:marker-style-name="T29"><text:span text:style-name="T55">Linux Kernel </text:span><text:span text:style-name="T30">的 </text:span><text:span text:style-name="T55">CFS </text:span><text:span text:style-name="T30">排程器、記憶體管理（</text:span><text:span text:style-name="T55">VMA</text:span><text:span text:style-name="T30">）、</text:span><text:span text:style-name="T55">Timer </text:span><text:span text:style-name="T30">均採用 </text:span><text:span text:style-name="T55">Red-Black Tree</text:span><text:span text:style-name="T30">。</text:span></text:p>
        </text:list-item>
      </text:list>
      <text:p text:style-name="P1"/>
      <text:p text:style-name="P1"/>
      <text:h text:style-name="P13" text:outline-level="1" loext:marker-style-name="T3"><text:span text:style-name="T4">十、公職考試常見陷阱整理</text:span><text:span text:style-name="T3"/></text:h>
      <text:p text:style-name="P1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2" loext:marker-style-name="T41"><text:span text:style-name="T70">陷阱 </text:span><text:span text:style-name="T56">1</text:span><text:span text:style-name="T70">：</text:span><text:span text:style-name="T56">Heap </text:span><text:span text:style-name="T70">搜尋 ≠ </text:span><text:span text:style-name="T56">O(log n)</text:span><text:span text:style-name="T70">，正確為 </text:span><text:span text:style-name="T56">O(n)</text:span><text:span text:style-name="T70">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70">陷阱 </text:span><text:span text:style-name="T56">2</text:span><text:span text:style-name="T70">：</text:span><text:span text:style-name="T56">Build Heap ≠ O(n log n)</text:span><text:span text:style-name="T70">，</text:span><text:span text:style-name="T56">Bottom-Up </text:span><text:span text:style-name="T70">法正確為 </text:span><text:span text:style-name="T56">O(n)</text:span><text:span text:style-name="T70">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70">陷阱 </text:span><text:span text:style-name="T56">3</text:span><text:span text:style-name="T70">：</text:span><text:span text:style-name="T56">Heap </text:span><text:span text:style-name="T70">是 </text:span><text:span text:style-name="T56">Complete Binary Tree</text:span><text:span text:style-name="T70">，不是 </text:span><text:span text:style-name="T56">Full Binary Tree</text:span><text:span text:style-name="T70">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70">陷阱 </text:span><text:span text:style-name="T56">4</text:span><text:span text:style-name="T70">：陣列索引從 </text:span><text:span text:style-name="T56">1 </text:span><text:span text:style-name="T70">開始，</text:span><text:span text:style-name="T56">parent = ⌊i/2⌋</text:span><text:span text:style-name="T70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70">陷阱 </text:span><text:span text:style-name="T56">5</text:span><text:span text:style-name="T70">：</text:span><text:span text:style-name="T56">Interval Heap </text:span><text:span text:style-name="T70">每個節點存的是區間 </text:span><text:span text:style-name="T56">[min, max]</text:span><text:span text:style-name="T70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70">陷阱 </text:span><text:span text:style-name="T56">6</text:span><text:span text:style-name="T70">：</text:span><text:span text:style-name="T56">Merge Leftist Heap </text:span><text:span text:style-name="T70">的新 </text:span><text:span text:style-name="T56">Root </text:span><text:span text:style-name="T70">是兩個 </text:span><text:span text:style-name="T56">Root </text:span><text:span text:style-name="T70">中較小的（</text:span><text:span text:style-name="T56">Min Heap</text:span><text:span text:style-name="T70">），</text:span></text:p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56"><text:s text:c="8"/>Max Leftist Heap </text:span><text:span text:style-name="T70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70">陷阱 </text:span><text:span text:style-name="T56">7</text:span><text:span text:style-name="T70">：</text:span><text:span text:style-name="T56">Heap Sort </text:span><text:span text:style-name="T70">是 </text:span><text:span text:style-name="T56">Unstable Sort</text:span><text:span text:style-name="T70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1"><text:span text:style-name="T70">陷阱 </text:span><text:span text:style-name="T56">8</text:span><text:span text:style-name="T70">：</text:span><text:span text:style-name="T56">Heap Sort </text:span><text:span text:style-name="T70">空間複雜度是 </text:span><text:span text:style-name="T56">O(1)</text:span><text:span text:style-name="T70">（</text:span><text:span text:style-name="T56">In-place</text:span><text:span text:style-name="T70">），不需額外空間。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十一、考試必背速查表（最終記憶版）</text:span><text:span text:style-name="T3"/></text:h>
      <text:p text:style-name="P1"/>
      <text:h text:style-name="P16" text:outline-level="2" loext:marker-style-name="T17"><text:span text:style-name="T18">核心定義</text:span><text:span text:style-name="T17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2" loext:marker-style-name="T41"><text:span text:style-name="T56">Heap = Complete Binary Tree + Heap Property</text:span><text:span text:style-name="T70">（</text:span><text:span text:style-name="T56">parent ≤/≥ child</text:span><text:span text:style-name="T70">）</text:span></text:p>
          </table:table-cell>
        </table:table-row>
        <text:soft-page-break/>
        <table:table-row table:style-name="表格53.1">
          <table:table-cell table:style-name="表格53.A1" office:value-type="string">
            <text:p text:style-name="P2"/>
          </table:table-cell>
        </table:table-row>
        <table:table-row table:style-name="表格53.1">
          <table:table-cell table:style-name="表格53.A1" office:value-type="string">
            <text:p text:style-name="P2" loext:marker-style-name="T41"><text:span text:style-name="T70">陣列索引（從 </text:span><text:span text:style-name="T56">1 </text:span><text:span text:style-name="T70">起）：</text:span></text:p>
          </table:table-cell>
        </table:table-row>
        <table:table-row table:style-name="表格53.1">
          <table:table-cell table:style-name="表格53.A1" office:value-type="string">
            <text:p text:style-name="P2" loext:marker-style-name="T41"><text:span text:style-name="T56"><text:s text:c="2"/>Root <text:s text:c="4"/>= A[1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2" loext:marker-style-name="T41"><text:span text:style-name="T56"><text:s text:c="2"/>Parent(i) = A[⌊i/2⌋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2" loext:marker-style-name="T41"><text:span text:style-name="T56"><text:s text:c="2"/>Left(i) <text:s/>= A[2i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2" loext:marker-style-name="T41"><text:span text:style-name="T56"><text:s text:c="2"/>Right(i) = A[2i+1]</text:span><text:span text:style-name="T41"/></text:p>
          </table:table-cell>
        </table:table-row>
      </table:table>
      <text:p text:style-name="P1"/>
      <text:h text:style-name="P16" text:outline-level="2" loext:marker-style-name="T17"><text:span text:style-name="T18">時間複雜度速查</text:span><text:span text:style-name="T17"/></text:h>
      <text:p text:style-name="P1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1" loext:marker-style-name="T5"><text:span text:style-name="T6">操作</text:span><text:span text:style-name="T5"/></text:p>
            </table:table-cell>
            <table:table-cell table:style-name="表格54.A1" office:value-type="string">
              <text:p text:style-name="P31" loext:marker-style-name="T5"><text:span text:style-name="T6">時間複雜度</text:span><text:span text:style-name="T5"/></text:p>
            </table:table-cell>
            <table:table-cell table:style-name="表格54.A1" office:value-type="string">
              <text:p text:style-name="P31" loext:marker-style-name="T5"><text:span text:style-name="T6">原因</text:span><text:span text:style-name="T5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31" loext:marker-style-name="T41"><text:span text:style-name="T56">Insert</text:span><text:span text:style-name="T70">（</text:span><text:span text:style-name="T56">Bubble Up</text:span><text:span text:style-name="T70">）</text:span></text:p>
          </table:table-cell>
          <table:table-cell table:style-name="表格54.A2" office:value-type="string">
            <text:p text:style-name="P31" loext:marker-style-name="T41"><text:span text:style-name="T56">O(log n)</text:span><text:span text:style-name="T41"/></text:p>
          </table:table-cell>
          <table:table-cell table:style-name="表格54.A2" office:value-type="string">
            <text:p text:style-name="P31" loext:marker-style-name="T41"><text:span text:style-name="T70">最多走 </text:span><text:span text:style-name="T56">h = log n </text:span><text:span text:style-name="T70">層</text:span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1"><text:span text:style-name="T56">Extract-Max</text:span><text:span text:style-name="T70">（</text:span><text:span text:style-name="T56">Heapify</text:span><text:span text:style-name="T70">）</text:span></text:p>
          </table:table-cell>
          <table:table-cell table:style-name="表格54.A2" office:value-type="string">
            <text:p text:style-name="P31" loext:marker-style-name="T41"><text:span text:style-name="T56">O(log n)</text:span><text:span text:style-name="T41"/></text:p>
          </table:table-cell>
          <table:table-cell table:style-name="表格54.A2" office:value-type="string">
            <text:p text:style-name="P31" loext:marker-style-name="T41"><text:span text:style-name="T70">最多走 </text:span><text:span text:style-name="T56">h = log n </text:span><text:span text:style-name="T70">層</text:span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1"><text:span text:style-name="T56">Build Heap</text:span><text:span text:style-name="T70">（</text:span><text:span text:style-name="T56">Bottom-Up</text:span><text:span text:style-name="T70">）</text:span></text:p>
          </table:table-cell>
          <table:table-cell table:style-name="表格54.A2" office:value-type="string">
            <text:p text:style-name="P31" loext:marker-style-name="T41"><text:span text:style-name="T56">O(n) ★</text:span><text:span text:style-name="T41"/></text:p>
          </table:table-cell>
          <table:table-cell table:style-name="表格54.A2" office:value-type="string">
            <text:p text:style-name="P31" loext:marker-style-name="T41"><text:span text:style-name="T56">Floyd </text:span><text:span text:style-name="T70">演算法</text:span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1"><text:span text:style-name="T70">逐個 </text:span><text:span text:style-name="T56">Insert </text:span><text:span text:style-name="T70">建 </text:span><text:span text:style-name="T56">Heap</text:span></text:p>
          </table:table-cell>
          <table:table-cell table:style-name="表格54.A2" office:value-type="string">
            <text:p text:style-name="P31" loext:marker-style-name="T41"><text:span text:style-name="T56">O(n log n)</text:span><text:span text:style-name="T41"/></text:p>
          </table:table-cell>
          <table:table-cell table:style-name="表格54.A2" office:value-type="string">
            <text:p text:style-name="P31" loext:marker-style-name="T41"><text:span text:style-name="T56">n </text:span><text:span text:style-name="T70">次 </text:span><text:span text:style-name="T56">× O(log n)</text:span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1"><text:span text:style-name="T56">Heap Sort</text:span><text:span text:style-name="T41"/></text:p>
          </table:table-cell>
          <table:table-cell table:style-name="表格54.A2" office:value-type="string">
            <text:p text:style-name="P31" loext:marker-style-name="T41"><text:span text:style-name="T56">O(n log n)</text:span><text:span text:style-name="T41"/></text:p>
          </table:table-cell>
          <table:table-cell table:style-name="表格54.A2" office:value-type="string">
            <text:p text:style-name="P31" loext:marker-style-name="T41"><text:span text:style-name="T56">O(n) + O(n log n)</text:span><text:span text:style-name="T41"/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1"><text:span text:style-name="T70">搜尋特定值</text:span><text:span text:style-name="T41"/></text:p>
          </table:table-cell>
          <table:table-cell table:style-name="表格54.A2" office:value-type="string">
            <text:p text:style-name="P31" loext:marker-style-name="T41"><text:span text:style-name="T56">O(n)</text:span><text:span text:style-name="T41"/></text:p>
          </table:table-cell>
          <table:table-cell table:style-name="表格54.A2" office:value-type="string">
            <text:p text:style-name="P31" loext:marker-style-name="T41"><text:span text:style-name="T70">無左右排序規則</text:span><text:span text:style-name="T41"/></text:p>
          </table:table-cell>
        </table:table-row>
        <table:table-row table:style-name="表格54.1">
          <table:table-cell table:style-name="表格54.A2" office:value-type="string">
            <text:p text:style-name="P31" loext:marker-style-name="T41"><text:span text:style-name="T56">Merge (Leftist Heap)</text:span><text:span text:style-name="T41"/></text:p>
          </table:table-cell>
          <table:table-cell table:style-name="表格54.A2" office:value-type="string">
            <text:p text:style-name="P31" loext:marker-style-name="T41"><text:span text:style-name="T56">O(log n + log m)</text:span><text:span text:style-name="T41"/></text:p>
          </table:table-cell>
          <table:table-cell table:style-name="表格54.A2" office:value-type="string">
            <text:p text:style-name="P31" loext:marker-style-name="T41"><text:span text:style-name="T70">右側路徑短</text:span><text:span text:style-name="T41"/></text:p>
          </table:table-cell>
        </table:table-row>
      </table:table>
      <text:p text:style-name="P1"/>
      <text:h text:style-name="P16" text:outline-level="2" loext:marker-style-name="T17"><text:span text:style-name="T26">Priority Queue </text:span><text:span text:style-name="T18">三種實作比較</text:span></text:h>
      <text:p text:style-name="P1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31" loext:marker-style-name="T5"><text:span text:style-name="T6">實作</text:span><text:span text:style-name="T5"/></text:p>
            </table:table-cell>
            <table:table-cell table:style-name="表格55.A1" office:value-type="string">
              <text:p text:style-name="P31" loext:marker-style-name="T5"><text:span text:style-name="T13">Insert</text:span><text:span text:style-name="T5"/></text:p>
            </table:table-cell>
            <table:table-cell table:style-name="表格55.A1" office:value-type="string">
              <text:p text:style-name="P31" loext:marker-style-name="T5"><text:span text:style-name="T13">Extract-Max</text:span><text:span text:style-name="T5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31" loext:marker-style-name="T41"><text:span text:style-name="T70">排序陣列</text:span><text:span text:style-name="T41"/></text:p>
          </table:table-cell>
          <table:table-cell table:style-name="表格55.A2" office:value-type="string">
            <text:p text:style-name="P31" loext:marker-style-name="T41"><text:span text:style-name="T56">O(n)</text:span><text:span text:style-name="T41"/></text:p>
          </table:table-cell>
          <table:table-cell table:style-name="表格55.A2" office:value-type="string">
            <text:p text:style-name="P31" loext:marker-style-name="T41"><text:span text:style-name="T56">O(1) <text:s/></text:span><text:span text:style-name="T70">取快插慢</text:span></text:p>
          </table:table-cell>
        </table:table-row>
        <table:table-row table:style-name="表格55.1">
          <table:table-cell table:style-name="表格55.A2" office:value-type="string">
            <text:p text:style-name="P31" loext:marker-style-name="T41"><text:span text:style-name="T70">未排序陣列</text:span><text:span text:style-name="T41"/></text:p>
          </table:table-cell>
          <table:table-cell table:style-name="表格55.A2" office:value-type="string">
            <text:p text:style-name="P31" loext:marker-style-name="T41"><text:span text:style-name="T56">O(1)</text:span><text:span text:style-name="T41"/></text:p>
          </table:table-cell>
          <table:table-cell table:style-name="表格55.A2" office:value-type="string">
            <text:p text:style-name="P31" loext:marker-style-name="T41"><text:span text:style-name="T56">O(n) <text:s/></text:span><text:span text:style-name="T70">插快取慢</text:span></text:p>
          </table:table-cell>
        </table:table-row>
        <table:table-row table:style-name="表格55.1">
          <table:table-cell table:style-name="表格55.A4" office:value-type="string">
            <text:p text:style-name="P31" loext:marker-style-name="T41"><text:span text:style-name="T56">Max Heap ★</text:span><text:span text:style-name="T41"/></text:p>
          </table:table-cell>
          <table:table-cell table:style-name="表格55.A4" office:value-type="string">
            <text:p text:style-name="P31" loext:marker-style-name="T41"><text:span text:style-name="T56">O(log n)</text:span><text:span text:style-name="T41"/></text:p>
          </table:table-cell>
          <table:table-cell table:style-name="表格55.A4" office:value-type="string">
            <text:p text:style-name="P31" loext:marker-style-name="T41"><text:span text:style-name="T56">O(log n) <text:s/></text:span><text:span text:style-name="T70">最均衡</text:span></text:p>
          </table:table-cell>
        </table:table-row>
      </table:table>
      <text:p text:style-name="P1"/>
      <text:h text:style-name="P16" text:outline-level="2" loext:marker-style-name="T17"><text:span text:style-name="T26">8 </text:span><text:span text:style-name="T18">句考試必背口訣</text:span></text:h>
      <text:p text:style-name="P1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" loext:marker-style-name="T41"><text:span text:style-name="T56">1. <text:s/>Heap = Complete BT + Heap Property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1"><text:span text:style-name="T56">2. <text:s/>parent = A[⌊i/2⌋]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1"><text:span text:style-name="T56">3. <text:s/>left child = A[2i]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1"><text:span text:style-name="T56">4. <text:s/>right child = A[2i+1]</text:span><text:span text:style-name="T41"/></text:p>
          </table:table-cell>
        </table:table-row>
        <text:soft-page-break/>
        <table:table-row table:style-name="表格56.1">
          <table:table-cell table:style-name="表格56.A1" office:value-type="string">
            <text:p text:style-name="P2" loext:marker-style-name="T41"><text:span text:style-name="T56">5. <text:s/>Insert → Bubble Up → O(log n)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1"><text:span text:style-name="T56">6. <text:s/>Delete/Extract → Heapify</text:span><text:span text:style-name="T70">（</text:span><text:span text:style-name="T56">Bubble Down</text:span><text:span text:style-name="T70">）→ </text:span><text:span text:style-name="T56">O(log n)</text:span></text:p>
          </table:table-cell>
        </table:table-row>
        <table:table-row table:style-name="表格56.1">
          <table:table-cell table:style-name="表格56.A1" office:value-type="string">
            <text:p text:style-name="P2" loext:marker-style-name="T41"><text:span text:style-name="T56">7. <text:s/>Build Heap</text:span><text:span text:style-name="T70">（</text:span><text:span text:style-name="T56">Bottom-Up</text:span><text:span text:style-name="T70">）</text:span><text:span text:style-name="T56">= O(n) <text:s/>★ </text:span><text:span text:style-name="T70">非 </text:span><text:span text:style-name="T56">O(n log n)</text:span></text:p>
          </table:table-cell>
        </table:table-row>
        <table:table-row table:style-name="表格56.1">
          <table:table-cell table:style-name="表格56.A1" office:value-type="string">
            <text:p text:style-name="P2" loext:marker-style-name="T41"><text:span text:style-name="T56">8. <text:s/>Heap Sort = O(n log n)</text:span><text:span text:style-name="T70">，</text:span><text:span text:style-name="T56">In-place</text:span><text:span text:style-name="T70">，</text:span><text:span text:style-name="T56">Unstabl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3T00:14:26</meta:creation-date>
    <meta:initial-creator>Un-named</meta:initial-creator>
    <dc:language>en-US</dc:language>
    <dc:date>2026-06-24T09:17:22.124000000</dc:date>
    <meta:editing-cycles>187</meta:editing-cycles>
    <meta:editing-duration>PT15H9M5S</meta:editing-duration>
    <meta:generator>MODA_ODF_Application_Tools/3.8.4.2$Windows_X86_64 LibreOffice_project/4fb77107d5af14329e08085efe4fa19b5633383a</meta:generator>
    <meta:document-statistic meta:table-count="56" meta:image-count="0" meta:object-count="0" meta:page-count="31" meta:paragraph-count="823" meta:word-count="7441" meta:character-count="19776" meta:non-whitespace-character-count="12980"/>
    <meta:user-defined meta:name="AppVersion">15.0000</meta:user-defined>
  </office:meta>
</office:document-meta>
</file>