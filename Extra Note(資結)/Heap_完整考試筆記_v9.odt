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" style:family="table">
      <style:table-properties style:width="15.875cm" fo:margin-left="0.004cm" fo:margin-top="0cm" fo:margin-bottom="0cm" table:align="left" style:writing-mode="page"/>
    </style:style>
    <style:style style:name="表格2.A" style:family="table-column">
      <style:table-column-properties style:column-width="3.524cm"/>
    </style:style>
    <style:style style:name="表格2.B" style:family="table-column">
      <style:table-column-properties style:column-width="5.295cm"/>
    </style:style>
    <style:style style:name="表格2.C" style:family="table-column">
      <style:table-column-properties style:column-width="7.05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" style:family="table">
      <style:table-properties style:width="15.875cm" fo:margin-left="0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15.8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8" style:family="table">
      <style:table-properties style:width="15.875cm" fo:margin-left="0cm" fo:margin-top="0cm" fo:margin-bottom="0cm" table:align="left" style:writing-mode="page"/>
    </style:style>
    <style:style style:name="表格8.A" style:family="table-column">
      <style:table-column-properties style:column-width="15.87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0" style:family="table">
      <style:table-properties style:width="15.875cm" fo:margin-left="0cm" fo:margin-top="0cm" fo:margin-bottom="0cm" table:align="left" style:writing-mode="page"/>
    </style:style>
    <style:style style:name="表格10.A" style:family="table-column">
      <style:table-column-properties style:column-width="15.87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4" style:family="table">
      <style:table-properties style:width="15.875cm" fo:margin-left="0cm" fo:margin-top="0cm" fo:margin-bottom="0cm" table:align="left" style:writing-mode="page"/>
    </style:style>
    <style:style style:name="表格14.A" style:family="table-column">
      <style:table-column-properties style:column-width="15.87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5" style:family="table">
      <style:table-properties style:width="15.875cm" fo:margin-left="0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6" style:family="table">
      <style:table-properties style:width="15.875cm" fo:margin-left="0cm" fo:margin-top="0cm" fo:margin-bottom="0cm" table:align="left" style:writing-mode="page"/>
    </style:style>
    <style:style style:name="表格16.A" style:family="table-column">
      <style:table-column-properties style:column-width="15.87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7" style:family="table">
      <style:table-properties style:width="15.875cm" fo:margin-left="0cm" fo:margin-top="0cm" fo:margin-bottom="0cm" table:align="left" style:writing-mode="page"/>
    </style:style>
    <style:style style:name="表格17.A" style:family="table-column">
      <style:table-column-properties style:column-width="15.87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9" style:family="table">
      <style:table-properties style:width="15.875cm" fo:margin-left="0.004cm" fo:margin-top="0cm" fo:margin-bottom="0cm" table:align="left" style:writing-mode="page"/>
    </style:style>
    <style:style style:name="表格19.A" style:family="table-column">
      <style:table-column-properties style:column-width="5.292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9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0" style:family="table">
      <style:table-properties style:width="15.875cm" fo:margin-left="0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2" style:family="table">
      <style:table-properties style:width="15.875cm" fo:margin-left="0cm" fo:margin-top="0cm" fo:margin-bottom="0cm" table:align="left" style:writing-mode="page"/>
    </style:style>
    <style:style style:name="表格22.A" style:family="table-column">
      <style:table-column-properties style:column-width="15.87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3" style:family="table">
      <style:table-properties style:width="15.875cm" fo:margin-left="0.004cm" fo:margin-top="0cm" fo:margin-bottom="0cm" table:align="left" style:writing-mode="page"/>
    </style:style>
    <style:style style:name="表格23.A" style:family="table-column">
      <style:table-column-properties style:column-width="5.29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3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4" style:family="table">
      <style:table-properties style:width="15.875cm" fo:margin-left="0cm" fo:margin-top="0cm" fo:margin-bottom="0cm" table:align="left" style:writing-mode="page"/>
    </style:style>
    <style:style style:name="表格24.A" style:family="table-column">
      <style:table-column-properties style:column-width="15.87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5" style:family="table">
      <style:table-properties style:width="15.875cm" fo:margin-left="0cm" fo:margin-top="0cm" fo:margin-bottom="0cm" table:align="left" style:writing-mode="page"/>
    </style:style>
    <style:style style:name="表格25.A" style:family="table-column">
      <style:table-column-properties style:column-width="15.875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6" style:family="table">
      <style:table-properties style:width="15.921cm" fo:margin-left="0.071cm" fo:margin-top="0cm" fo:margin-bottom="0cm" table:align="left" style:writing-mode="page"/>
    </style:style>
    <style:style style:name="表格26.A" style:family="table-column">
      <style:table-column-properties style:column-width="15.92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27" style:family="table">
      <style:table-properties style:width="15.921cm" fo:margin-left="0.071cm" fo:margin-top="0cm" fo:margin-bottom="0cm" table:align="left" style:writing-mode="page"/>
    </style:style>
    <style:style style:name="表格27.A" style:family="table-column">
      <style:table-column-properties style:column-width="15.92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8" style:family="table">
      <style:table-properties style:width="15.921cm" fo:margin-left="0.071cm" fo:margin-top="0cm" fo:margin-bottom="0cm" table:align="left" style:writing-mode="page"/>
    </style:style>
    <style:style style:name="表格28.A" style:family="table-column">
      <style:table-column-properties style:column-width="15.92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29" style:family="table">
      <style:table-properties style:width="15.921cm" fo:margin-left="0.071cm" fo:margin-top="0cm" fo:margin-bottom="0cm" table:align="left" style:writing-mode="page"/>
    </style:style>
    <style:style style:name="表格29.A" style:family="table-column">
      <style:table-column-properties style:column-width="15.9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30" style:family="table">
      <style:table-properties style:width="15.875cm" fo:margin-left="0cm" fo:margin-top="0cm" fo:margin-bottom="0cm" table:align="left" style:writing-mode="page"/>
    </style:style>
    <style:style style:name="表格30.A" style:family="table-column">
      <style:table-column-properties style:column-width="15.875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1" style:family="table">
      <style:table-properties style:width="15.875cm" fo:margin-left="0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2" style:family="table">
      <style:table-properties style:width="15.875cm" fo:margin-left="0cm" fo:margin-top="0cm" fo:margin-bottom="0cm" table:align="left" style:writing-mode="page"/>
    </style:style>
    <style:style style:name="表格32.A" style:family="table-column">
      <style:table-column-properties style:column-width="15.875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3" style:family="table">
      <style:table-properties style:width="15.875cm" fo:margin-left="0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4" style:family="table">
      <style:table-properties style:width="15.875cm" fo:margin-left="0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5" style:family="table">
      <style:table-properties style:width="15.875cm" fo:margin-left="0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6" style:family="table">
      <style:table-properties style:width="15.875cm" fo:margin-left="0cm" fo:margin-top="0cm" fo:margin-bottom="0cm" table:align="left" style:writing-mode="page"/>
    </style:style>
    <style:style style:name="表格36.A" style:family="table-column">
      <style:table-column-properties style:column-width="15.87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7" style:family="table">
      <style:table-properties style:width="15.875cm" fo:margin-left="0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8" style:family="table">
      <style:table-properties style:width="15.875cm" fo:margin-left="0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9" style:family="table">
      <style:table-properties style:width="15.921cm" fo:margin-left="0.009cm" fo:margin-top="0cm" fo:margin-bottom="0cm" table:align="left" style:writing-mode="page"/>
    </style:style>
    <style:style style:name="表格39.A" style:family="table-column">
      <style:table-column-properties style:column-width="4.41cm"/>
    </style:style>
    <style:style style:name="表格39.B" style:family="table-column">
      <style:table-column-properties style:column-width="3.528cm"/>
    </style:style>
    <style:style style:name="表格39.C" style:family="table-column">
      <style:table-column-properties style:column-width="3.524cm"/>
    </style:style>
    <style:style style:name="表格39.D" style:family="table-column">
      <style:table-column-properties style:column-width="4.459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39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39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0" style:family="table">
      <style:table-properties style:width="15.921cm" fo:margin-left="0.071cm" fo:margin-top="0cm" fo:margin-bottom="0cm" table:align="left" style:writing-mode="page"/>
    </style:style>
    <style:style style:name="表格40.A" style:family="table-column">
      <style:table-column-properties style:column-width="15.92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1" style:family="table">
      <style:table-properties style:width="15.921cm" fo:margin-left="0.071cm" fo:margin-top="0cm" fo:margin-bottom="0cm" table:align="left" style:writing-mode="page"/>
    </style:style>
    <style:style style:name="表格41.A" style:family="table-column">
      <style:table-column-properties style:column-width="15.92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2" style:family="table">
      <style:table-properties style:width="15.921cm" fo:margin-left="0.071cm" fo:margin-top="0cm" fo:margin-bottom="0cm" table:align="left" style:writing-mode="page"/>
    </style:style>
    <style:style style:name="表格42.A" style:family="table-column">
      <style:table-column-properties style:column-width="15.92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3" style:family="table">
      <style:table-properties style:width="15.921cm" fo:margin-left="0.071cm" fo:margin-top="0cm" fo:margin-bottom="0cm" table:align="left" style:writing-mode="page"/>
    </style:style>
    <style:style style:name="表格43.A" style:family="table-column">
      <style:table-column-properties style:column-width="15.92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4" style:family="table">
      <style:table-properties style:width="15.921cm" fo:margin-left="0.071cm" fo:margin-top="0cm" fo:margin-bottom="0cm" table:align="left" style:writing-mode="page"/>
    </style:style>
    <style:style style:name="表格44.A" style:family="table-column">
      <style:table-column-properties style:column-width="15.92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5" style:family="table">
      <style:table-properties style:width="15.921cm" fo:margin-left="0.071cm" fo:margin-top="0cm" fo:margin-bottom="0cm" table:align="left" style:writing-mode="page"/>
    </style:style>
    <style:style style:name="表格45.A" style:family="table-column">
      <style:table-column-properties style:column-width="15.92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6" style:family="table">
      <style:table-properties style:width="15.921cm" fo:margin-left="0.071cm" fo:margin-top="0cm" fo:margin-bottom="0cm" table:align="left" style:writing-mode="page"/>
    </style:style>
    <style:style style:name="表格46.A" style:family="table-column">
      <style:table-column-properties style:column-width="15.92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47" style:family="table">
      <style:table-properties style:width="15.921cm" fo:margin-left="0.009cm" fo:margin-top="0cm" fo:margin-bottom="0cm" table:align="left" style:writing-mode="page"/>
    </style:style>
    <style:style style:name="表格47.A" style:family="table-column">
      <style:table-column-properties style:column-width="4.935cm"/>
    </style:style>
    <style:style style:name="表格47.B" style:family="table-column">
      <style:table-column-properties style:column-width="5.472cm"/>
    </style:style>
    <style:style style:name="表格47.C" style:family="table-column">
      <style:table-column-properties style:column-width="5.514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47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47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8" style:family="table">
      <style:table-properties style:width="15.921cm" fo:margin-left="0.071cm" fo:margin-top="0cm" fo:margin-bottom="0cm" table:align="left" style:writing-mode="page"/>
    </style:style>
    <style:style style:name="表格48.A" style:family="table-column">
      <style:table-column-properties style:column-width="15.92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9" style:family="table">
      <style:table-properties style:width="15.875cm" fo:margin-left="0.004cm" fo:margin-top="0cm" fo:margin-bottom="0cm" table:align="left" style:writing-mode="page"/>
    </style:style>
    <style:style style:name="表格49.A" style:family="table-column">
      <style:table-column-properties style:column-width="3.969cm"/>
    </style:style>
    <style:style style:name="表格49.C" style:family="table-column">
      <style:table-column-properties style:column-width="7.93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0" style:family="table">
      <style:table-properties style:width="15.875cm" fo:margin-left="0.004cm" fo:margin-top="0cm" fo:margin-bottom="0cm" table:align="left" style:writing-mode="page"/>
    </style:style>
    <style:style style:name="表格50.A" style:family="table-column">
      <style:table-column-properties style:column-width="3.969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0.A2" style:family="table-cell">
      <style:table-cell-properties style:vertical-align="middle" fo:background-color="#ffffff" fo:padding-left="0.212cm" fo:padding-right="0.212cm" fo:padding-top="0.141cm" fo:padding-bottom="0.141cm" fo:border="0.25pt solid #9dc3e6">
        <style:background-image/>
      </style:table-cell-properties>
    </style:style>
    <style:style style:name="表格50.A3" style:family="table-cell">
      <style:table-cell-properties style:vertical-align="middle" fo:background-color="#ebf3fb" fo:padding-left="0.212cm" fo:padding-right="0.212cm" fo:padding-top="0.141cm" fo:padding-bottom="0.141cm" fo:border="0.25pt solid #9dc3e6">
        <style:background-image/>
      </style:table-cell-properties>
    </style:style>
    <style:style style:name="表格51" style:family="table">
      <style:table-properties style:width="15.875cm" fo:margin-left="0cm" fo:margin-top="0cm" fo:margin-bottom="0cm" table:align="left" style:writing-mode="page"/>
    </style:style>
    <style:style style:name="表格51.A" style:family="table-column">
      <style:table-column-properties style:column-width="15.875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2" style:family="table">
      <style:table-properties style:width="15.875cm" fo:margin-left="0cm" fo:margin-top="0cm" fo:margin-bottom="0cm" table:align="left" style:writing-mode="page"/>
    </style:style>
    <style:style style:name="表格52.A" style:family="table-column">
      <style:table-column-properties style:column-width="15.875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3" style:family="table">
      <style:table-properties style:width="15.875cm" fo:margin-left="0cm" fo:margin-top="0cm" fo:margin-bottom="0cm" table:align="left" style:writing-mode="page"/>
    </style:style>
    <style:style style:name="表格53.A" style:family="table-column">
      <style:table-column-properties style:column-width="15.875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4" style:family="table">
      <style:table-properties style:width="15.875cm" fo:margin-left="0.004cm" fo:margin-top="0cm" fo:margin-bottom="0cm" table:align="left" style:writing-mode="page"/>
    </style:style>
    <style:style style:name="表格54.A" style:family="table-column">
      <style:table-column-properties style:column-width="5.292cm"/>
    </style:style>
    <style:style style:name="表格54.B" style:family="table-column">
      <style:table-column-properties style:column-width="3.528cm"/>
    </style:style>
    <style:style style:name="表格54.C" style:family="table-column">
      <style:table-column-properties style:column-width="7.056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4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" style:family="table">
      <style:table-properties style:width="15.875cm" fo:margin-left="0.004cm" fo:margin-top="0cm" fo:margin-bottom="0cm" table:align="left" style:writing-mode="page"/>
    </style:style>
    <style:style style:name="表格55.A" style:family="table-column">
      <style:table-column-properties style:column-width="5.292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5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56" style:family="table">
      <style:table-properties style:width="15.875cm" fo:margin-left="0cm" fo:margin-top="0cm" fo:margin-bottom="0cm" table:align="left" style:writing-mode="page"/>
    </style:style>
    <style:style style:name="表格56.A" style:family="table-column">
      <style:table-column-properties style:column-width="15.875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P1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212cm" fo:border-left="none" fo:border-right="none" fo:border-top="none" fo:border-bottom="1.5pt solid #2e75b6"/>
    </style:style>
    <style:style style:name="P3" style:family="paragraph" style:parent-style-name="Standard">
      <style:paragraph-properties fo:margin-top="0.071cm" fo:margin-bottom="0.071cm" style:contextual-spacing="false"/>
    </style:style>
    <style:style style:name="P4" style:family="paragraph" style:parent-style-name="Heading_20_1">
      <style:paragraph-properties fo:margin-left="0cm" fo:margin-right="0cm" fo:margin-top="0.529cm" fo:margin-bottom="0.212cm" style:contextual-spacing="false" fo:text-indent="0cm" style:auto-text-indent="false" fo:padding-left="0cm" fo:padding-right="0cm" fo:padding-top="0cm" fo:padding-bottom="0.141cm" fo:border-left="none" fo:border-right="none" fo:border-top="none" fo:border-bottom="0.99pt solid #2e75b6"/>
    </style:style>
    <style:style style:name="P5" style:family="paragraph" style:parent-style-name="Standard">
      <style:paragraph-properties fo:margin-top="0.106cm" fo:margin-bottom="0.106cm" style:contextual-spacing="false"/>
    </style:style>
    <style:style style:name="P6" style:family="paragraph" style:parent-style-name="Heading_20_2">
      <style:paragraph-properties fo:margin-left="0cm" fo:margin-right="0cm" fo:margin-top="0.423cm" fo:margin-bottom="0.141cm" style:contextual-spacing="false" fo:text-indent="0cm" style:auto-text-indent="false"/>
    </style:style>
    <style:style style:name="P7" style:family="paragraph" style:parent-style-name="List_20_Paragraph" style:list-style-name="WWNum5">
      <style:paragraph-properties fo:margin-left="1.27cm" fo:margin-right="0cm" fo:margin-top="0.071cm" fo:margin-bottom="0.071cm" style:contextual-spacing="false" fo:text-indent="-0.635cm" style:auto-text-indent="false"/>
    </style:style>
    <style:style style:name="P8" style:family="paragraph" style:parent-style-name="List_20_Paragraph" style:list-style-name="WWNum6">
      <style:paragraph-properties fo:margin-left="1.27cm" fo:margin-right="0cm" fo:margin-top="0.071cm" fo:margin-bottom="0.071cm" style:contextual-spacing="false" fo:text-indent="-0.635cm" style:auto-text-indent="false"/>
    </style:style>
    <style:style style:name="P9" style:family="paragraph" style:parent-style-name="Standard">
      <style:paragraph-properties fo:margin-top="0.053cm" fo:margin-bottom="0.053cm" style:contextual-spacing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List_20_Paragraph" style:list-style-name="WWNum7">
      <style:paragraph-properties fo:margin-left="1.27cm" fo:margin-right="0cm" fo:margin-top="0.071cm" fo:margin-bottom="0.071cm" style:contextual-spacing="false" fo:text-indent="-0.635cm" style:auto-text-indent="false"/>
    </style:style>
    <style:style style:name="P12" style:family="paragraph" style:parent-style-name="List_20_Paragraph" style:list-style-name="WWNum8">
      <style:paragraph-properties fo:margin-left="1.27cm" fo:margin-right="0cm" fo:margin-top="0.071cm" fo:margin-bottom="0.071cm" style:contextual-spacing="false" fo:text-indent="-0.635cm" style:auto-text-indent="false"/>
    </style:style>
    <style:style style:name="P13" style:family="paragraph" style:parent-style-name="List_20_Paragraph" style:list-style-name="WWNum9">
      <style:paragraph-properties fo:margin-left="1.27cm" fo:margin-right="0cm" fo:margin-top="0.071cm" fo:margin-bottom="0.071cm" style:contextual-spacing="false" fo:text-indent="-0.635cm" style:auto-text-indent="false"/>
    </style:style>
    <style:style style:name="P14" style:family="paragraph" style:parent-style-name="Standard">
      <style:paragraph-properties fo:margin-top="0.318cm" fo:margin-bottom="0.106cm" style:contextual-spacing="false"/>
    </style:style>
    <style:style style:name="P15" style:family="paragraph" style:parent-style-name="Standard">
      <style:paragraph-properties fo:margin-top="0.053cm" fo:margin-bottom="0.053cm" style:contextual-spacing="false"/>
      <style:text-properties officeooo:paragraph-rsid="00542c65"/>
    </style:style>
    <style:style style:name="P16" style:family="paragraph" style:parent-style-name="Standard">
      <style:paragraph-properties fo:margin-top="0.053cm" fo:margin-bottom="0.053cm" style:contextual-spacing="false"/>
      <style:text-properties officeooo:paragraph-rsid="00554de0"/>
    </style:style>
    <style:style style:name="P17" style:family="paragraph" style:parent-style-name="List_20_Paragraph" style:list-style-name="WWNum10">
      <style:paragraph-properties fo:margin-left="1.27cm" fo:margin-right="0cm" fo:margin-top="0.071cm" fo:margin-bottom="0.071cm" style:contextual-spacing="false" fo:text-indent="-0.635cm" style:auto-text-indent="false"/>
    </style:style>
    <style:style style:name="P18" style:family="paragraph" style:parent-style-name="List_20_Paragraph" style:list-style-name="WWNum11">
      <style:paragraph-properties fo:margin-left="1.27cm" fo:margin-right="0cm" fo:margin-top="0.071cm" fo:margin-bottom="0.071cm" style:contextual-spacing="false" fo:text-indent="-0.635cm" style:auto-text-indent="false"/>
    </style:style>
    <style:style style:name="P19" style:family="paragraph" style:parent-style-name="List_20_Paragraph" style:list-style-name="WWNum12">
      <style:paragraph-properties fo:margin-left="1.27cm" fo:margin-right="0cm" fo:margin-top="0.071cm" fo:margin-bottom="0.071cm" style:contextual-spacing="false" fo:text-indent="-0.635cm" style:auto-text-indent="false"/>
    </style:style>
    <style:style style:name="P20" style:family="paragraph" style:parent-style-name="List_20_Paragraph" style:list-style-name="WWNum13">
      <style:paragraph-properties fo:margin-left="1.27cm" fo:margin-right="0cm" fo:margin-top="0.071cm" fo:margin-bottom="0.071cm" style:contextual-spacing="false" fo:text-indent="-0.635cm" style:auto-text-indent="false"/>
    </style:style>
    <style:style style:name="P21" style:family="paragraph" style:parent-style-name="Standard">
      <style:paragraph-properties fo:margin-top="0.053cm" fo:margin-bottom="0.053cm" style:contextual-spacing="false"/>
      <style:text-properties officeooo:paragraph-rsid="005ccf35"/>
    </style:style>
    <style:style style:name="P22" style:family="paragraph" style:parent-style-name="Standard">
      <style:paragraph-properties fo:margin-top="0.106cm" fo:margin-bottom="0.106cm" style:contextual-spacing="false"/>
      <style:text-properties officeooo:paragraph-rsid="00661972"/>
    </style:style>
    <style:style style:name="P23" style:family="paragraph" style:parent-style-name="Standard">
      <style:paragraph-properties fo:margin-top="0.053cm" fo:margin-bottom="0.053cm" style:contextual-spacing="false"/>
      <style:text-properties fo:color="#ffea00" loext:opacity="100%" fo:font-weight="bold" fo:background-color="#bf360c" style:font-weight-asian="bold" style:font-weight-complex="bold"/>
    </style:style>
    <style:style style:name="P24" style:family="paragraph" style:parent-style-name="Standard" style:list-style-name="WWNum2">
      <style:paragraph-properties fo:margin-top="0.071cm" fo:margin-bottom="0.071cm" style:contextual-spacing="false"/>
    </style:style>
    <style:style style:name="P25" style:family="paragraph" style:parent-style-name="Standard">
      <style:paragraph-properties fo:text-align="center" style:justify-single-word="false"/>
      <style:text-properties fo:color="#ffea00" loext:opacity="100%" fo:background-color="#311b92"/>
    </style:style>
    <style:style style:name="P26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27" style:family="paragraph" style:parent-style-name="Heading_20_2">
      <style:paragraph-properties fo:margin-left="0cm" fo:margin-right="0cm" fo:margin-top="0.529cm" fo:margin-bottom="0.247cm" style:contextual-spacing="false" fo:text-indent="0cm" style:auto-text-indent="false"/>
    </style:style>
    <style:style style:name="P28" style:family="paragraph" style:parent-style-name="Standard">
      <style:paragraph-properties fo:margin-top="0cm" fo:margin-bottom="0.212cm" style:contextual-spacing="false"/>
    </style:style>
    <style:style style:name="P29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</style:style>
    <style:style style:name="P30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31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32" style:family="paragraph" style:parent-style-name="Standard">
      <loext:graphic-properties draw:fill="solid" draw:fill-color="#f4f6f9"/>
      <style:paragraph-properties fo:margin-left="0.494cm" fo:margin-right="0.353cm" fo:margin-top="0cm" fo:margin-bottom="0.141cm" style:contextual-spacing="false" fo:text-indent="0cm" style:auto-text-indent="false" fo:background-color="#f4f6f9" fo:padding="0cm" fo:border-left="4pt solid #2e75b6" fo:border-right="0.51pt solid #bbbbbb" fo:border-top="none" fo:border-bottom="0.51pt solid #bbbbbb" style:shadow="none"/>
    </style:style>
    <style:style style:name="P33" style:family="paragraph" style:parent-style-name="Standard">
      <style:paragraph-properties fo:margin-top="0cm" fo:margin-bottom="0.141cm" style:contextual-spacing="false"/>
    </style:style>
    <style:style style:name="P34" style:family="paragraph" style:parent-style-name="List_20_Paragraph" style:list-style-name="WWNum14">
      <style:paragraph-properties fo:margin-top="0cm" fo:margin-bottom="0.141cm" style:contextual-spacing="false"/>
    </style:style>
    <style:style style:name="P35" style:family="paragraph" style:parent-style-name="Standard">
      <style:paragraph-properties fo:margin-top="0cm" fo:margin-bottom="0cm" style:contextual-spacing="false"/>
    </style:style>
    <style:style style:name="P36" style:family="paragraph" style:parent-style-name="Standard">
      <style:paragraph-properties fo:margin-top="0cm" fo:margin-bottom="0.282cm" style:contextual-spacing="false"/>
    </style:style>
    <style:style style:name="P37" style:family="paragraph" style:parent-style-name="Standard">
      <style:paragraph-properties fo:margin-top="0.053cm" fo:margin-bottom="0.053cm" style:contextual-spacing="false"/>
      <style:text-properties fo:color="#ff3d00" loext:opacity="100%" fo:font-weight="bold" fo:background-color="#64ffda" style:font-weight-asian="bold" style:font-weight-complex="bold"/>
    </style:style>
    <style:style style:name="P38" style:family="paragraph" style:parent-style-name="Standard">
      <style:paragraph-properties fo:margin-top="0.353cm" fo:margin-bottom="0.176cm" style:contextual-spacing="false"/>
    </style:style>
    <style:style style:name="P39" style:family="paragraph" style:parent-style-name="Standard">
      <style:paragraph-properties fo:margin-top="0cm" fo:margin-bottom="0.071cm" style:contextual-spacing="false"/>
    </style:style>
    <style:style style:name="P40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41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" style:family="text">
      <style:text-properties fo:color="#1f4e79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" style:family="text">
      <style:text-properties fo:color="#1f4e79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3" style:family="text">
      <style:text-properties fo:color="#1f4e79" loext:opacity="100%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4" style:family="text">
      <style:text-properties fo:color="#2e75b6" loext:opacity="100%"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5" style:family="text">
      <style:text-properties fo:color="#2e75b6" loext:opacity="100%" style:font-name="Arial1" fo:font-size="11pt" fo:font-style="italic" style:font-size-asian="11pt" style:font-style-asian="italic" style:font-name-complex="Arial2" style:font-size-complex="11pt" style:font-style-complex="italic"/>
    </style:style>
    <style:style style:name="T6" style:family="text">
      <style:text-properties fo:color="#2e75b6" loext:opacity="100%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7" style:family="text">
      <style:text-properties fo:color="#1f4e79" loext:opacity="100%"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8" style:family="text">
      <style:text-properties fo:color="#1f4e79" loext:opacity="100%" style:font-name="Arial1" fo:font-size="16pt" fo:font-weight="bold" style:font-size-asian="16pt" style:font-weight-asian="bold" style:font-name-complex="Arial2" style:font-size-complex="16pt" style:font-weight-complex="bold"/>
    </style:style>
    <style:style style:name="T9" style:family="text">
      <style:text-properties fo:color="#1f4e79" loext:opacity="100%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10" style:family="text">
      <style:text-properties fo:color="#595959" loext:opacity="100%" style:font-name="Arial1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1" style:family="text">
      <style:text-properties fo:color="#595959" loext:opacity="100%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2" style:family="text">
      <style:text-properties fo:color="#595959" loext:opacity="100%" style:font-name="Arial1" fo:font-size="11pt" fo:font-style="normal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3" style:family="text">
      <style:text-properties fo:color="#2e75b6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4" style:family="text">
      <style:text-properties fo:color="#2e75b6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15" style:family="text">
      <style:text-properties fo:color="#2e75b6" loext:opacity="100%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6" style:family="text">
      <style:text-properties fo:color="#595959" loext:opacity="100%" style:font-name="Arial1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17" style:family="text">
      <style:text-properties fo:color="#00e676" loext:opacity="100%" style:font-name="Arial1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18" style:family="text">
      <style:text-properties fo:color="#595959" loext:opacity="100%" style:font-name="Arial1" fo:font-size="10.5pt" fo:font-weight="normal" style:font-size-asian="10.5pt" style:font-weight-asian="normal" style:font-name-complex="Arial2" style:font-size-complex="10.5pt" style:font-weight-complex="normal"/>
    </style:style>
    <style:style style:name="T19" style:family="text">
      <style:text-properties fo:color="#595959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20" style:family="text">
      <style:text-properties fo:color="#ff5252" loext:opacity="100%" style:font-name="Arial1" fo:font-size="10.5pt" fo:font-weight="bold" fo:background-color="#ffebee" loext:char-shading-value="0" style:font-size-asian="10.5pt" style:font-weight-asian="bold" style:font-name-complex="Arial2" style:font-size-complex="10.5pt" style:font-weight-complex="bold"/>
    </style:style>
    <style:style style:name="T21" style:family="text">
      <style:text-properties fo:color="#18ffff" loext:opacity="100%" style:font-name="Arial1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22" style:family="text">
      <style:text-properties fo:color="#595959" loext:opacity="100%" style:font-name="Arial1" fo:font-size="10.5pt" style:font-name-asian="Arial2" style:font-size-asian="10.5pt" style:font-name-complex="Arial2" style:font-size-complex="10.5pt"/>
    </style:style>
    <style:style style:name="T23" style:family="text">
      <style:text-properties fo:color="#595959" loext:opacity="100%" fo:font-size="10.5pt" style:font-name-asian="Arial2" style:font-size-asian="10.5pt" style:font-name-complex="Arial2" style:font-size-complex="10.5pt"/>
    </style:style>
    <style:style style:name="T24" style:family="text">
      <style:text-properties fo:color="#595959" loext:opacity="100%" style:font-name="Arial1" fo:font-size="10.5pt" style:font-size-asian="10.5pt" style:font-name-complex="Arial2" style:font-size-complex="10.5pt"/>
    </style:style>
    <style:style style:name="T25" style:family="text">
      <style:text-properties fo:color="#595959" loext:opacity="100%" style:font-name="Arial1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26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27" style:family="text">
      <style:text-properties fo:color="#1f4e79" loext:opacity="100%" style:font-name="Arial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8" style:family="text">
      <style:text-properties fo:color="#1f4e79" loext:opacity="100%"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29" style:family="text">
      <style:text-properties fo:color="#76ff03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30" style:family="text">
      <style:text-properties fo:color="#595959" loext:opacity="100%" style:font-name="Arial1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31" style:family="text">
      <style:text-properties fo:color="#ff1744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32" style:family="text">
      <style:text-properties fo:color="#595959" loext:opacity="100%" style:font-name="Arial1" fo:font-size="10.5pt" fo:font-weight="bold" fo:background-color="#ff1744" loext:char-shading-value="0" style:font-size-asian="10.5pt" style:font-weight-asian="bold" style:font-name-complex="Arial2" style:font-size-complex="10.5pt" style:font-weight-complex="bold"/>
    </style:style>
    <style:style style:name="T33" style:family="text">
      <style:text-properties fo:color="#64ffda" loext:opacity="100%" fo:font-size="10.5pt" fo:font-weight="bold" fo:background-color="#6d4c41" loext:char-shading-value="0" style:font-name-asian="Arial2" style:font-size-asian="10.5pt" style:font-weight-asian="bold" style:font-name-complex="Arial2" style:font-size-complex="10.5pt" style:font-weight-complex="bold"/>
    </style:style>
    <style:style style:name="T34" style:family="text">
      <style:text-properties fo:color="#ffd740" loext:opacity="100%" fo:font-size="11pt" fo:font-style="normal" fo:font-weight="bold" fo:background-color="#000000" loext:char-shading-value="0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35" style:family="text">
      <style:text-properties fo:color="#ffd740" loext:opacity="100%" style:font-name="Arial1" fo:font-size="11pt" fo:font-style="normal" fo:font-weight="bold" fo:background-color="#000000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36" style:family="text">
      <style:text-properties fo:color="#ff4081" loext:opacity="100%" style:font-name="Arial1" fo:font-size="11pt" fo:font-style="normal" fo:font-weight="bold" fo:background-color="#fce4ec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37" style:family="text">
      <style:text-properties fo:color="#c6ff00" loext:opacity="100%" fo:font-size="10.5pt" fo:font-weight="bold" fo:background-color="#ff4081" loext:char-shading-value="0" style:font-name-asian="Arial2" style:font-size-asian="10.5pt" style:font-weight-asian="bold" style:font-name-complex="Arial2" style:font-size-complex="10.5pt" style:font-weight-complex="bold"/>
    </style:style>
    <style:style style:name="T38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39" style:family="text">
      <style:text-properties fo:color="#ffd74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40" style:family="text">
      <style:text-properties fo:color="#76ff03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41" style:family="text">
      <style:text-properties fo:color="#ff9100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42" style:family="text">
      <style:text-properties fo:color="#76ff03" loext:opacity="100%" fo:font-size="10.5pt" fo:font-weight="bold" fo:background-color="#1b5e20" loext:char-shading-value="0" style:font-name-asian="Arial2" style:font-size-asian="10.5pt" style:font-weight-asian="bold" style:font-name-complex="Arial2" style:font-size-complex="10.5pt" style:font-weight-complex="bold"/>
    </style:style>
    <style:style style:name="T43" style:family="text">
      <style:text-properties fo:color="#18ffff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44" style:family="text">
      <style:text-properties fo:color="#ffea00" loext:opacity="100%" fo:font-size="10.5pt" fo:font-weight="bold" fo:background-color="#e65100" loext:char-shading-value="0" style:font-name-asian="Arial2" style:font-size-asian="10.5pt" style:font-weight-asian="bold" style:font-name-complex="Arial2" style:font-size-complex="10.5pt" style:font-weight-complex="bold"/>
    </style:style>
    <style:style style:name="T45" style:family="text">
      <style:text-properties fo:color="#18ffff" loext:opacity="100%" style:font-name="Arial1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46" style:family="text">
      <style:text-properties fo:color="#e1bee7" loext:opacity="100%" style:font-name="Arial1" fo:font-size="10.5pt" fo:font-weight="bold" fo:background-color="#4a148c" loext:char-shading-value="0" style:font-size-asian="10.5pt" style:font-weight-asian="bold" style:font-name-complex="Arial2" style:font-size-complex="10.5pt" style:font-weight-complex="bold"/>
    </style:style>
    <style:style style:name="T47" style:family="text">
      <style:text-properties fo:color="#e1bee7" loext:opacity="100%" fo:font-size="10.5pt" fo:font-weight="bold" fo:background-color="#4a148c" loext:char-shading-value="0" style:font-name-asian="Arial2" style:font-size-asian="10.5pt" style:font-weight-asian="bold" style:font-name-complex="Arial2" style:font-size-complex="10.5pt" style:font-weight-complex="bold"/>
    </style:style>
    <style:style style:name="T48" style:family="text">
      <style:text-properties fo:color="#595959" loext:opacity="100%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49" style:family="text">
      <style:text-properties fo:color="#ff3d00" loext:opacity="100%" style:font-name="Arial1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50" style:family="text">
      <style:text-properties fo:color="#c6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51" style:family="text">
      <style:text-properties fo:color="#1f4e7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52" style:family="text">
      <style:text-properties fo:color="#1f4e7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53" style:family="text">
      <style:text-properties fo:color="#1f4e79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54" style:family="text">
      <style:text-properties fo:color="#595959" loext:opacity="100%" fo:font-size="10.5pt" fo:font-weight="bold" fo:background-color="#76ff03" loext:char-shading-value="0" style:font-name-asian="Arial2" style:font-size-asian="10.5pt" style:font-weight-asian="bold" style:font-name-complex="Arial2" style:font-size-complex="10.5pt" style:font-weight-complex="bold"/>
    </style:style>
    <style:style style:name="T55" style:family="text">
      <style:text-properties fo:color="#d1c4e9" loext:opacity="100%" fo:font-size="10.5pt" fo:font-weight="bold" fo:background-color="#311b92" loext:char-shading-value="0" style:font-name-asian="Arial2" style:font-size-asian="10.5pt" style:font-weight-asian="bold" style:font-name-complex="Arial2" style:font-size-complex="10.5pt" style:font-weight-complex="bold"/>
    </style:style>
    <style:style style:name="T56" style:family="text">
      <style:text-properties fo:color="#d1c4e9" loext:opacity="100%" style:font-name="Arial1" fo:font-size="10.5pt" fo:font-weight="bold" fo:background-color="#311b92" loext:char-shading-value="0" style:font-size-asian="10.5pt" style:font-weight-asian="bold" style:font-name-complex="Arial2" style:font-size-complex="10.5pt" style:font-weight-complex="bold"/>
    </style:style>
    <style:style style:name="T57" style:family="text">
      <style:text-properties fo:color="#595959" loext:opacity="100%" style:font-name="Arial1" fo:font-size="10.5pt" fo:font-weight="bold" fo:background-color="#18ffff" loext:char-shading-value="0" style:font-size-asian="10.5pt" style:font-weight-asian="bold" style:font-name-complex="Arial2" style:font-size-complex="10.5pt" style:font-weight-complex="bold"/>
    </style:style>
    <style:style style:name="T58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59" style:family="text">
      <style:text-properties fo:color="#18ffff" loext:opacity="100%" style:font-name="Arial1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60" style:family="text">
      <style:text-properties fo:color="#ff3d00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61" style:family="text">
      <style:text-properties fo:color="#ffd740" loext:opacity="100%" style:font-name="Arial1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62" style:family="text">
      <style:text-properties fo:color="#ff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63" style:family="text">
      <style:text-properties fo:color="#76ff03" loext:opacity="100%" style:font-name="Arial1" fo:font-size="10.5pt" fo:font-weight="bold" fo:background-color="#1b5e20" loext:char-shading-value="0" style:font-size-asian="10.5pt" style:font-weight-asian="bold" style:font-name-complex="Arial2" style:font-size-complex="10.5pt" style:font-weight-complex="bold"/>
    </style:style>
    <style:style style:name="T64" style:family="text">
      <style:text-properties fo:color="#595959" loext:opacity="100%" style:font-name="Arial1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65" style:family="text">
      <style:text-properties fo:color="#1f4e79" loext:opacity="100%" fo:font-size="16pt" fo:font-weight="bold" style:font-size-asian="16pt" style:font-weight-asian="bold" style:font-name-complex="Arial2" style:font-size-complex="16pt" style:font-weight-complex="bold"/>
    </style:style>
    <style:style style:name="T66" style:family="text">
      <style:text-properties fo:color="#2e75b6" loext:opacity="100%" fo:font-size="13pt" fo:font-weight="bold" style:font-size-asian="13pt" style:font-weight-asian="bold" style:font-name-complex="Arial2" style:font-size-complex="13pt" style:font-weight-complex="bold"/>
    </style:style>
    <style:style style:name="T67" style:family="text">
      <style:text-properties fo:color="#595959" loext:opacity="100%" style:font-name="Arial1" fo:font-size="11pt" style:font-name-asian="Arial2" style:font-size-asian="11pt" style:font-name-complex="Arial2" style:font-size-complex="11pt"/>
    </style:style>
    <style:style style:name="T68" style:family="text">
      <style:text-properties fo:color="#595959" loext:opacity="100%" style:font-name="Arial1" fo:font-size="11pt" style:font-size-asian="11pt" style:font-name-complex="Arial2" style:font-size-complex="11pt"/>
    </style:style>
    <style:style style:name="T69" style:family="text">
      <style:text-properties fo:color="#18ffff" loext:opacity="100%" style:font-name="Arial1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70" style:family="text">
      <style:text-properties fo:color="#595959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71" style:family="text">
      <style:text-properties fo:color="#595959" loext:opacity="100%" fo:font-size="11pt" style:font-size-asian="11pt" style:font-name-complex="Arial2" style:font-size-complex="11pt"/>
    </style:style>
    <style:style style:name="T72" style:family="text">
      <style:text-properties fo:color="#76ff03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73" style:family="text">
      <style:text-properties fo:color="#76ff03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74" style:family="text">
      <style:text-properties fo:color="#ff3d00" loext:opacity="100%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75" style:family="text">
      <style:text-properties fo:color="#595959" loext:opacity="100%" fo:font-size="10.5pt" style:font-size-asian="10.5pt" style:font-name-complex="Arial2" style:font-size-complex="10.5pt"/>
    </style:style>
    <style:style style:name="T76" style:family="text">
      <style:text-properties fo:color="#c6ff00" loext:opacity="100%" fo:font-size="10.5pt" fo:font-weight="bold" fo:background-color="#f50057" loext:char-shading-value="0" style:font-name-asian="Arial2" style:font-size-asian="10.5pt" style:font-weight-asian="bold" style:font-name-complex="Arial2" style:font-size-complex="10.5pt" style:font-weight-complex="bold"/>
    </style:style>
    <style:style style:name="T77" style:family="text">
      <style:text-properties fo:color="#ffff0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78" style:family="text">
      <style:text-properties fo:color="#ffff0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79" style:family="text">
      <style:text-properties fo:color="#18ffff" loext:opacity="100%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80" style:family="text">
      <style:text-properties fo:color="#c6ff00" loext:opacity="100%" style:font-name="Arial1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81" style:family="text">
      <style:text-properties fo:color="#ffff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82" style:family="text">
      <style:text-properties fo:color="#ffff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83" style:family="text">
      <style:text-properties fo:color="#18ffff" loext:opacity="100%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84" style:family="text">
      <style:text-properties fo:color="#00e676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85" style:family="text">
      <style:text-properties fo:color="#c6ff00" loext:opacity="100%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86" style:family="text">
      <style:text-properties fo:color="#ff3d00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87" style:family="text">
      <style:text-properties fo:color="#ffd740" loext:opacity="100%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88" style:family="text">
      <style:text-properties fo:color="#59595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89" style:family="text">
      <style:text-properties fo:color="#595959" loext:opacity="100%" fo:font-size="11pt" fo:font-weight="bold" style:font-size-asian="11pt" style:font-weight-asian="bold" style:font-name-complex="Arial2" style:font-size-complex="11pt" style:font-weight-complex="bold"/>
    </style:style>
    <style:style style:name="T90" style:family="text">
      <style:text-properties fo:color="#ff1744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91" style:family="text">
      <style:text-properties fo:color="#00e676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92" style:family="text">
      <style:text-properties fo:color="#00e676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93" style:family="text">
      <style:text-properties fo:color="#18ffff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94" style:family="text">
      <style:text-properties fo:color="#18ffff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95" style:family="text">
      <style:text-properties fo:color="#595959" loext:opacity="100%" fo:font-size="10.5pt" fo:background-color="#0d47a1" loext:char-shading-value="0" style:font-name-asian="Arial2" style:font-size-asian="10.5pt" style:font-name-complex="Arial2" style:font-size-complex="10.5pt"/>
    </style:style>
    <style:style style:name="T96" style:family="text">
      <style:text-properties fo:color="#ff4081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97" style:family="text">
      <style:text-properties fo:color="#ff4081" loext:opacity="100%" fo:font-size="10.5pt" fo:font-weight="bold" fo:background-color="#0d47a1" loext:char-shading-value="0" style:font-size-asian="10.5pt" style:font-weight-asian="bold" style:font-name-complex="Arial2" style:font-size-complex="10.5pt" style:font-weight-complex="bold"/>
    </style:style>
    <style:style style:name="T98" style:family="text">
      <style:text-properties fo:color="#595959" loext:opacity="100%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99" style:family="text">
      <style:text-properties fo:color="#595959" loext:opacity="100%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100" style:family="text">
      <style:text-properties fo:color="#595959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01" style:family="text">
      <style:text-properties fo:color="#595959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102" style:family="text">
      <style:text-properties fo:color="#595959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103" style:family="text">
      <style:text-properties fo:color="#18ffff" loext:opacity="100%" fo:font-size="13pt" fo:font-weight="bold" fo:background-color="#d500f9" loext:char-shading-value="0" style:font-name-asian="Arial2" style:font-size-asian="13pt" style:font-weight-asian="bold" style:font-name-complex="Arial2" style:font-size-complex="13pt" style:font-weight-complex="bold"/>
    </style:style>
    <style:style style:name="T104" style:family="text">
      <style:text-properties fo:color="#18ffff" loext:opacity="100%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105" style:family="text">
      <style:text-properties fo:color="#ffff00" loext:opacity="100%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106" style:family="text">
      <style:text-properties fo:color="#c6ff00" loext:opacity="100%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07" style:family="text">
      <style:text-properties fo:color="#ffd740" loext:opacity="100%" style:font-name="Arial1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08" style:family="text">
      <style:text-properties fo:color="#76ff03" loext:opacity="100%" style:font-name="Arial1" fo:font-size="11pt" fo:font-weight="bold" fo:background-color="#1b5e20" loext:char-shading-value="0" style:font-size-asian="11pt" style:font-weight-asian="bold" style:font-name-complex="Arial2" style:font-size-complex="11pt" style:font-weight-complex="bold"/>
    </style:style>
    <style:style style:name="T109" style:family="text">
      <style:text-properties fo:color="#ff3d00" loext:opacity="100%" style:font-name="Arial1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10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111" style:family="text">
      <style:text-properties fo:font-weight="bold" fo:background-color="#ffd740" loext:char-shading-value="0" style:font-weight-asian="bold" style:font-weight-complex="bold"/>
    </style:style>
    <style:style style:name="T112" style:family="text">
      <style:text-properties fo:font-weight="bold" fo:background-color="#18ffff" loext:char-shading-value="0" style:font-weight-asian="bold" style:font-weight-complex="bold"/>
    </style:style>
    <style:style style:name="T113" style:family="text">
      <style:text-properties fo:font-weight="bold" fo:background-color="#ffff00" loext:char-shading-value="0" style:font-weight-asian="bold" style:font-weight-complex="bold"/>
    </style:style>
    <style:style style:name="T114" style:family="text">
      <style:text-properties fo:color="#ffea00" loext:opacity="100%" fo:font-weight="bold" fo:background-color="#bf360c" loext:char-shading-value="0" style:font-weight-asian="bold" style:font-weight-complex="bold"/>
    </style:style>
    <style:style style:name="T115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16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17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18" style:family="text">
      <style:text-properties fo:color="#ffea00" loext:opacity="100%" fo:font-weight="bold" fo:background-color="#b71c1c" loext:char-shading-value="0" style:font-weight-asian="bold" style:font-weight-complex="bold"/>
    </style:style>
    <style:style style:name="T119" style:family="text">
      <style:text-properties fo:color="#ffea00" loext:opacity="100%" fo:font-weight="bold" fo:background-color="#1a237e" loext:char-shading-value="0" style:font-weight-asian="bold" style:font-weight-complex="bold"/>
    </style:style>
    <style:style style:name="T120" style:family="text">
      <style:text-properties fo:color="#ff1744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21" style:family="text">
      <style:text-properties fo:color="#ff1744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122" style:family="text">
      <style:text-properties fo:color="#ffd740" loext:opacity="100%" fo:font-size="10.5pt" fo:font-weight="bold" fo:background-color="#651fff" loext:char-shading-value="0" style:font-name-asian="Arial2" style:font-size-asian="10.5pt" style:font-weight-asian="bold" style:font-name-complex="Arial2" style:font-size-complex="10.5pt" style:font-weight-complex="bold"/>
    </style:style>
    <style:style style:name="T123" style:family="text">
      <style:text-properties fo:color="#ffd740" loext:opacity="100%" fo:font-size="10.5pt" fo:font-weight="bold" fo:background-color="#651fff" loext:char-shading-value="0" style:font-size-asian="10.5pt" style:font-weight-asian="bold" style:font-name-complex="Arial2" style:font-size-complex="10.5pt" style:font-weight-complex="bold"/>
    </style:style>
    <style:style style:name="T124" style:family="text">
      <style:text-properties fo:color="#ffff00" loext:opacity="100%" fo:font-size="10.5pt" fo:font-weight="bold" fo:background-color="#1de9b6" loext:char-shading-value="0" style:font-size-asian="10.5pt" style:font-weight-asian="bold" style:font-name-complex="Arial2" style:font-size-complex="10.5pt" style:font-weight-complex="bold"/>
    </style:style>
    <style:style style:name="T125" style:family="text">
      <style:text-properties fo:color="#ffd74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26" style:family="text">
      <style:text-properties fo:color="#ffd740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127" style:family="text">
      <style:text-properties fo:color="#ffd74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28" style:family="text">
      <style:text-properties fo:color="#3d5afe" loext:opacity="100%" style:font-name="Arial1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129" style:family="text">
      <style:text-properties fo:color="#3d5afe" loext:opacity="100%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130" style:family="text">
      <style:text-properties fo:color="#00e676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31" style:family="text">
      <style:text-properties fo:color="#00e676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32" style:family="text">
      <style:text-properties fo:color="#595959" loext:opacity="100%" style:font-name="Arial1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33" style:family="text">
      <style:text-properties fo:color="#595959" loext:opacity="100%" fo:font-size="11pt" fo:font-weight="bold" fo:background-color="#76ff03" loext:char-shading-value="0" style:font-size-asian="11pt" style:font-weight-asian="bold" style:font-name-complex="Arial2" style:font-size-complex="11pt" style:font-weight-complex="bold"/>
    </style:style>
    <style:style style:name="T134" style:family="text">
      <style:text-properties fo:color="#76ff03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135" style:family="text">
      <style:text-properties fo:color="#ff3d00" loext:opacity="100%" fo:font-size="10.5pt" fo:font-weight="bold" fo:background-color="#00e676" loext:char-shading-value="0" style:font-size-asian="10.5pt" style:font-weight-asian="bold" style:font-name-complex="Arial2" style:font-size-complex="10.5pt" style:font-weight-complex="bold"/>
    </style:style>
    <style:style style:name="T136" style:family="text">
      <style:text-properties fo:color="#595959" loext:opacity="100%" fo:font-size="10.5pt" fo:background-color="#ffff00" loext:char-shading-value="0" style:font-size-asian="10.5pt" style:font-name-complex="Arial2" style:font-size-complex="10.5pt"/>
    </style:style>
    <style:style style:name="T137" style:family="text">
      <style:text-properties fo:color="#595959" loext:opacity="100%" fo:font-size="10.5pt" fo:background-color="#ffff00" loext:char-shading-value="0" style:font-name-asian="Arial2" style:font-size-asian="10.5pt" style:font-name-complex="Arial2" style:font-size-complex="10.5pt"/>
    </style:style>
    <style:style style:name="T138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139" style:family="text">
      <style:text-properties fo:color="#595959" loext:opacity="100%" fo:font-size="10.5pt" fo:font-weight="bold" fo:background-color="#ffc400" loext:char-shading-value="0" style:font-name-asian="Arial2" style:font-size-asian="10.5pt" style:font-weight-asian="bold" style:font-name-complex="Arial2" style:font-size-complex="10.5pt" style:font-weight-complex="bold"/>
    </style:style>
    <style:style style:name="T140" style:family="text">
      <style:text-properties fo:color="#1f4e79" loext:opacity="100%" fo:font-size="10.5pt" fo:font-weight="bold" style:font-size-asian="10.5pt" style:font-weight-asian="bold" style:font-name-complex="Arial2" style:font-size-complex="10.5pt" style:font-weight-complex="bold"/>
    </style:style>
    <style:style style:name="T141" style:family="text">
      <style:text-properties fo:font-size="10.5pt" fo:font-weight="bold" style:font-size-asian="10.5pt" style:font-weight-asian="bold" style:font-name-complex="Arial2" style:font-size-complex="10.5pt" style:font-weight-complex="bold"/>
    </style:style>
    <style:style style:name="T142" style:family="text">
      <style:text-properties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143" style:family="text">
      <style:text-properties fo:color="#00e676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144" style:family="text"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45" style:family="text">
      <style:text-properties fo:color="#1f3864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146" style:family="text">
      <style:text-properties fo:color="#2e75b6" loext:opacity="100%" style:font-name="Arial1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147" style:family="text">
      <style:text-properties fo:color="#2e75b6" loext:opacity="100%" style:font-name="Arial1" fo:font-size="15pt" fo:font-weight="bold" style:font-size-asian="15pt" style:font-weight-asian="bold" style:font-name-complex="Arial2" style:font-size-complex="15pt" style:font-weight-complex="bold"/>
    </style:style>
    <style:style style:name="T148" style:family="text">
      <style:text-properties fo:color="#2e75b6" loext:opacity="100%" style:font-name="Arial1" fo:font-size="15pt" fo:font-weight="bold" fo:background-color="#ffd740" loext:char-shading-value="0" style:font-size-asian="15pt" style:font-weight-asian="bold" style:font-name-complex="Arial2" style:font-size-complex="15pt" style:font-weight-complex="bold"/>
    </style:style>
    <style:style style:name="T149" style:family="text">
      <style:text-properties fo:color="#2e75b6" loext:opacity="100%" style:font-name="Arial1" fo:font-size="15pt" fo:font-weight="bold" fo:background-color="#ffd740" loext:char-shading-value="0" style:font-name-asian="Arial2" style:font-size-asian="15pt" style:font-weight-asian="bold" style:font-name-complex="Arial2" style:font-size-complex="15pt" style:font-weight-complex="bold"/>
    </style:style>
    <style:style style:name="T150" style:family="text">
      <style:text-properties fo:color="#ff3d00" loext:opacity="100%" style:font-name="Arial1" fo:font-size="15pt" fo:font-weight="bold" fo:background-color="#64ffda" loext:char-shading-value="0" style:font-size-asian="15pt" style:font-weight-asian="bold" style:font-name-complex="Arial2" style:font-size-complex="15pt" style:font-weight-complex="bold"/>
    </style:style>
    <style:style style:name="T151" style:family="text">
      <style:text-properties fo:color="#1a1a1a" loext:opacity="100%" style:font-name="Arial1" fo:font-size="12pt" style:font-name-asian="Arial2" style:font-size-asian="12pt" style:font-name-complex="Arial2" style:font-size-complex="12pt"/>
    </style:style>
    <style:style style:name="T152" style:family="text">
      <style:text-properties fo:color="#1a1a1a" loext:opacity="100%" style:font-name="Arial1" fo:font-size="12pt" style:font-size-asian="12pt" style:font-name-complex="Arial2" style:font-size-complex="12pt"/>
    </style:style>
    <style:style style:name="T153" style:family="text"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T154" style:family="text">
      <style:text-properties fo:color="#2b2b2b" loext:opacity="100%" style:font-name="Courier New" fo:font-size="9.5pt" fo:font-weight="bold" fo:background-color="#ffff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5" style:family="text">
      <style:text-properties fo:color="#00e676" loext:opacity="100%" style:font-name="Courier New" fo:font-size="9.5pt" fo:font-weight="bold" fo:background-color="#5d403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6" style:family="text">
      <style:text-properties fo:color="#d500f9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7" style:family="text">
      <style:text-properties fo:color="#ffff00" loext:opacity="100%" style:font-name="Courier New" fo:font-size="9.5pt" fo:font-weight="bold" fo:background-color="#ff91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8" style:family="text">
      <style:text-properties fo:color="#00e676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59" style:family="text">
      <style:text-properties fo:color="#00e676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60" style:family="text">
      <style:text-properties fo:color="#18ffff" loext:opacity="100%" style:font-name="Arial1" fo:font-size="12pt" fo:font-weight="bold" fo:background-color="#d500f9" loext:char-shading-value="0" style:font-size-asian="12pt" style:font-weight-asian="bold" style:font-name-complex="Arial2" style:font-size-complex="12pt" style:font-weight-complex="bold"/>
    </style:style>
    <style:style style:name="T161" style:family="text">
      <style:text-properties fo:color="#1a1a1a" loext:opacity="100%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62" style:family="text">
      <style:text-properties fo:color="#1a1a1a" loext:opacity="100%" style:font-name="Arial1" fo:font-size="12pt" fo:font-weight="bold" style:font-size-asian="12pt" style:font-weight-asian="bold" style:font-name-complex="Arial2" style:font-size-complex="12pt" style:font-weight-complex="bold"/>
    </style:style>
    <style:style style:name="T163" style:family="text">
      <style:text-properties fo:color="#1a1a1a" loext:opacity="100%" style:font-name="Arial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164" style:family="text">
      <style:text-properties fo:color="#1a1a1a" loext:opacity="100%"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T165" style:family="text">
      <style:text-properties fo:color="#1a1a1a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66" style:family="text">
      <style:text-properties fo:color="#ffd740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167" style:family="text">
      <style:text-properties fo:color="#c6ff00" loext:opacity="100%" style:font-name="Courier New" fo:font-size="9.5pt" fo:font-weight="bold" fo:background-color="#f5005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68" style:family="text">
      <style:text-properties fo:color="#76ff03" loext:opacity="100%" style:font-name="Arial1" fo:font-size="12pt" fo:font-weight="bold" fo:background-color="#6d4c41" loext:char-shading-value="0" style:font-size-asian="12pt" style:font-weight-asian="bold" style:font-name-complex="Arial2" style:font-size-complex="12pt" style:font-weight-complex="bold"/>
    </style:style>
    <style:style style:name="T169" style:family="text">
      <style:text-properties fo:color="#ff3d00" loext:opacity="100%" style:font-name="Arial1" fo:font-size="12pt" fo:font-weight="bold" fo:background-color="#64ffda" loext:char-shading-value="0" style:font-size-asian="12pt" style:font-weight-asian="bold" style:font-name-complex="Arial2" style:font-size-complex="12pt" style:font-weight-complex="bold"/>
    </style:style>
    <style:style style:name="T170" style:family="text">
      <style:text-properties fo:color="#ff3d00" loext:opacity="100%" style:font-name="Arial1" fo:font-size="12pt" fo:font-weight="bold" fo:background-color="#64ffda" loext:char-shading-value="0" style:font-name-asian="Arial2" style:font-size-asian="12pt" style:font-weight-asian="bold" style:font-name-complex="Arial2" style:font-size-complex="12pt" style:font-weight-complex="bold"/>
    </style:style>
    <style:style style:name="T171" style:family="text">
      <style:text-properties fo:color="#1a1a1a" loext:opacity="100%" style:font-name="Arial1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172" style:family="text">
      <style:text-properties fo:color="#1a1a1a" loext:opacity="100%" style:font-name="Arial1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173" style:family="text">
      <style:text-properties fo:color="#18ffff" loext:opacity="100%" style:font-name="Arial1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174" style:family="text">
      <style:text-properties fo:color="#ffff00" loext:opacity="100%" style:font-name="Arial1" fo:font-size="12pt" fo:font-weight="bold" fo:background-color="#ff9100" loext:char-shading-value="0" style:font-size-asian="12pt" style:font-weight-asian="bold" style:font-name-complex="Arial2" style:font-size-complex="12pt" style:font-weight-complex="bold"/>
    </style:style>
    <style:style style:name="T175" style:family="text">
      <style:text-properties fo:color="#1a1a1a" loext:opacity="100%" style:font-name="Arial1" fo:font-size="12pt" fo:background-color="#ffff00" loext:char-shading-value="0" style:font-size-asian="12pt" style:font-name-complex="Arial2" style:font-size-complex="12pt"/>
    </style:style>
    <style:style style:name="T176" style:family="text">
      <style:text-properties fo:color="#c6ff00" loext:opacity="100%" style:font-name="Arial1" fo:font-size="12pt" fo:font-weight="bold" fo:background-color="#f50057" loext:char-shading-value="0" style:font-size-asian="12pt" style:font-weight-asian="bold" style:font-name-complex="Arial2" style:font-size-complex="12pt" style:font-weight-complex="bold"/>
    </style:style>
    <style:style style:name="T177" style:family="text">
      <style:text-properties fo:color="#ffd740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178" style:family="text">
      <style:text-properties fo:color="#2b2b2b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79" style:family="text">
      <style:text-properties fo:color="#1de9b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80" style:family="text">
      <style:text-properties fo:color="#1de9b6" loext:opacity="100%" style:font-name="Courier New" fo:font-size="9.5pt" style:font-name-asian="Courier New1" style:font-size-asian="9.5pt" style:font-name-complex="Courier New1" style:font-size-complex="9.5pt"/>
    </style:style>
    <style:style style:name="T181" style:family="text">
      <style:text-properties fo:color="#1a1a1a" loext:opacity="100%" style:font-name="Arial1" fo:font-size="12pt" fo:font-weight="bold" fo:background-color="#ffab40" loext:char-shading-value="0" style:font-size-asian="12pt" style:font-weight-asian="bold" style:font-name-complex="Arial2" style:font-size-complex="12pt" style:font-weight-complex="bold"/>
    </style:style>
    <style:style style:name="T182" style:family="text">
      <style:text-properties fo:color="#1a1a1a" loext:opacity="100%" style:font-name="Arial1" fo:font-size="12pt" fo:font-weight="bold" fo:background-color="#ffab40" loext:char-shading-value="0" style:font-name-asian="Arial2" style:font-size-asian="12pt" style:font-weight-asian="bold" style:font-name-complex="Arial2" style:font-size-complex="12pt" style:font-weight-complex="bold"/>
    </style:style>
    <style:style style:name="T183" style:family="text">
      <style:text-properties fo:color="#ff1744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84" style:family="text">
      <style:text-properties fo:color="#1a1a1a" loext:opacity="100%" style:font-name="Arial1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185" style:family="text">
      <style:text-properties fo:color="#ff1744" loext:opacity="100%" style:font-name="Arial1" fo:font-size="12pt" fo:font-weight="bold" fo:background-color="#ffcdd2" loext:char-shading-value="0" style:font-name-asian="Arial2" style:font-size-asian="12pt" style:font-weight-asian="bold" style:font-name-complex="Arial2" style:font-size-complex="12pt" style:font-weight-complex="bold"/>
    </style:style>
    <style:style style:name="T186" style:family="text">
      <style:text-properties fo:color="#ff4081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87" style:family="text">
      <style:text-properties fo:color="#ff4081" loext:opacity="100%" style:font-name="Arial1" fo:font-size="12pt" fo:font-weight="bold" fo:background-color="#fce4ec" loext:char-shading-value="0" style:font-name-asian="Arial2" style:font-size-asian="12pt" style:font-weight-asian="bold" style:font-name-complex="Arial2" style:font-size-complex="12pt" style:font-weight-complex="bold"/>
    </style:style>
    <style:style style:name="T188" style:family="text">
      <style:text-properties fo:color="#ff1744" loext:opacity="100%" style:font-name="Arial1" fo:font-size="12pt" fo:font-weight="bold" fo:background-color="#ffebee" loext:char-shading-value="0" style:font-name-asian="Arial2" style:font-size-asian="12pt" style:font-weight-asian="bold" style:font-name-complex="Arial2" style:font-size-complex="12pt" style:font-weight-complex="bold"/>
    </style:style>
    <style:style style:name="T189" style:family="text">
      <style:text-properties fo:color="#ff1744" loext:opacity="100%" style:font-name="Arial1" fo:font-size="12pt" fo:font-weight="bold" fo:background-color="#ffebee" loext:char-shading-value="0" style:font-size-asian="12pt" style:font-weight-asian="bold" style:font-name-complex="Arial2" style:font-size-complex="12pt" style:font-weight-complex="bold"/>
    </style:style>
    <style:style style:name="T190" style:family="text">
      <style:text-properties fo:color="#ff4081" loext:opacity="100%" style:font-name="Arial1" fo:font-size="12pt" fo:font-weight="bold" fo:background-color="#fce4ec" loext:char-shading-value="0" style:font-size-asian="12pt" style:font-weight-asian="bold" style:font-name-complex="Arial2" style:font-size-complex="12pt" style:font-weight-complex="bold"/>
    </style:style>
    <style:style style:name="T191" style:family="text">
      <style:text-properties fo:color="#8d6e63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192" style:family="text">
      <style:text-properties fo:color="#ffd740" loext:opacity="100%" style:font-name="Courier New" fo:font-size="9.5pt" fo:font-weight="bold" fo:background-color="#3d5afe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93" style:family="text">
      <style:text-properties fo:color="#d500f9" loext:opacity="100%" style:font-name="Courier New" fo:font-size="9.5pt" fo:font-weight="bold" fo:background-color="#f3e5f5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94" style:family="text">
      <style:text-properties fo:color="#ff3d00" loext:opacity="100%" style:font-name="Courier New" fo:font-size="9.5pt" fo:font-weight="bold" fo:background-color="#fbe9e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95" style:family="text">
      <style:text-properties fo:color="#ff1744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96" style:family="text">
      <style:text-properties fo:color="#e0e0e0" loext:opacity="100%" style:font-name="Arial1" fo:font-size="12pt" fo:font-weight="bold" fo:background-color="#ff1744" loext:char-shading-value="0" style:font-size-asian="12pt" style:font-weight-asian="bold" style:font-name-complex="Arial2" style:font-size-complex="12pt" style:font-weight-complex="bold"/>
    </style:style>
    <style:style style:name="T197" style:family="text">
      <style:text-properties fo:color="#ff4081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98" style:family="text">
      <style:text-properties fo:color="#e0e0e0" loext:opacity="100%" style:font-name="Arial1" fo:font-size="12pt" fo:font-weight="bold" fo:background-color="#ff4081" loext:char-shading-value="0" style:font-size-asian="12pt" style:font-weight-asian="bold" style:font-name-complex="Arial2" style:font-size-complex="12pt" style:font-weight-complex="bold"/>
    </style:style>
    <style:style style:name="T199" style:family="text">
      <style:text-properties fo:color="#ffd740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200" style:family="text">
      <style:text-properties fo:color="#ffd740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201" style:family="text">
      <style:text-properties fo:color="#1a1a1a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202" style:family="text">
      <style:text-properties fo:color="#c6ff00" loext:opacity="100%" style:font-name="Arial1" fo:font-size="13pt" fo:font-weight="bold" fo:background-color="#f50057" loext:char-shading-value="0" style:font-size-asian="13pt" style:font-weight-asian="bold" style:font-name-complex="Arial2" style:font-size-complex="13pt" style:font-weight-complex="bold"/>
    </style:style>
    <style:style style:name="T203" style:family="text">
      <style:text-properties fo:color="#ffff00" loext:opacity="100%" style:font-name="Arial1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204" style:family="text">
      <style:text-properties fo:color="#404040" loext:opacity="100%" style:font-name="Arial1" fo:font-size="11pt" style:font-name-asian="Arial2" style:font-size-asian="11pt" style:font-name-complex="Arial2" style:font-size-complex="11pt"/>
    </style:style>
    <style:style style:name="T205" style:family="text">
      <style:text-properties fo:color="#404040" loext:opacity="100%" fo:font-size="11pt" style:font-name-asian="Arial2" style:font-size-asian="11pt" style:font-name-complex="Arial2" style:font-size-complex="11pt"/>
    </style:style>
    <style:style style:name="T206" style:family="text">
      <style:text-properties fo:color="#76ff03" loext:opacity="100%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207" style:family="text">
      <style:text-properties fo:color="#1f4e79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08" style:family="text">
      <style:text-properties fo:color="#eeff4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209" style:family="text">
      <style:text-properties fo:color="#ff408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210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211" style:family="text">
      <style:text-properties fo:color="#ffff00" loext:opacity="100%" fo:font-size="11pt" fo:font-weight="bold" fo:background-color="#ff9100" loext:char-shading-value="0" style:font-name-asian="Arial2" style:font-size-asian="11pt" style:font-weight-asian="bold" style:font-name-complex="Arial2" style:font-size-complex="11pt" style:font-weight-complex="bold"/>
    </style:style>
    <style:style style:name="T212" style:family="text">
      <style:text-properties fo:color="#ff910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213" style:family="text">
      <style:text-properties fo:color="#2e75b6" loext:opacity="100%" style:font-name="Arial1" fo:font-size="13pt" fo:font-weight="bold" fo:background-color="#ffd740" loext:char-shading-value="0" style:font-size-asian="13pt" style:font-weight-asian="bold" style:font-name-complex="Arial2" style:font-size-complex="13pt" style:font-weight-complex="bold"/>
    </style:style>
    <style:style style:name="T214" style:family="text">
      <style:text-properties fo:color="#ffc4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215" style:family="text">
      <style:text-properties fo:font-size="10.5pt" style:font-name-asian="Arial2" style:font-size-asian="10.5pt" style:font-name-complex="Arial2" style:font-size-complex="10.5pt"/>
    </style:style>
    <style:style style:name="T216" style:family="text">
      <style:text-properties fo:color="#eeff41" loext:opacity="100%" fo:font-size="10.5pt" fo:background-color="#d500f9" loext:char-shading-value="0" style:font-name-asian="Arial2" style:font-size-asian="10.5pt" style:font-name-complex="Arial2" style:font-size-complex="10.5pt"/>
    </style:style>
    <style:style style:name="T217" style:family="text">
      <style:text-properties fo:color="#eeff41" loext:opacity="100%" fo:font-size="10.5pt" fo:background-color="#ff1744" loext:char-shading-value="0" style:font-name-asian="Arial2" style:font-size-asian="10.5pt" style:font-name-complex="Arial2" style:font-size-complex="10.5pt"/>
    </style:style>
    <style:style style:name="T218" style:family="text">
      <style:text-properties fo:color="#ffff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219" style:family="text">
      <style:text-properties fo:color="#ffffff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20" style:family="text">
      <style:text-properties fo:color="#ffffff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221" style:family="text">
      <style:text-properties fo:color="#1a1a1a" loext:opacity="100%" style:font-name="Arial1" fo:font-size="11pt" style:font-name-asian="Arial2" style:font-size-asian="11pt" style:font-name-complex="Arial2" style:font-size-complex="11pt"/>
    </style:style>
    <style:style style:name="T222" style:family="text">
      <style:text-properties fo:color="#1a1a1a" loext:opacity="100%" style:font-name="Arial1" fo:font-size="11pt" style:font-size-asian="11pt" style:font-name-complex="Arial2" style:font-size-complex="11pt"/>
    </style:style>
    <style:style style:name="T223" style:family="text">
      <style:text-properties fo:color="#ff5252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224" style:family="text">
      <style:text-properties fo:color="#ff5252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225" style:family="text">
      <style:text-properties fo:color="#00e67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26" style:family="text">
      <style:text-properties fo:color="#ff3d00" loext:opacity="100%" style:font-name="Courier New" fo:font-size="9.5pt" fo:font-weight="bold" fo:background-color="#64ffda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27" style:family="text">
      <style:text-properties fo:color="#ff4081" loext:opacity="100%" style:font-name="Courier New" fo:font-size="9.5pt" fo:font-weight="bold" fo:background-color="#0000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28" style:family="text">
      <style:text-properties fo:color="#1f3864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29" style:family="text">
      <style:text-properties fo:color="#1f3864" loext:opacity="100%" style:font-name="Arial1" fo:font-size="13pt" fo:font-weight="bold" style:font-size-asian="13pt" style:font-weight-asian="bold" style:font-name-complex="Arial2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【</text:span><text:span text:style-name="T3">11</text:span><text:span text:style-name="T2">】堆積（</text:span><text:span text:style-name="T3">Heap</text:span><text:span text:style-name="T2">）＋優先佇列（</text:span><text:span text:style-name="T3">Priority Queue</text:span><text:span text:style-name="T2">）</text:span></text:p>
      <text:p text:style-name="P2" loext:marker-style-name="T4"><text:span text:style-name="T5">資訊類公職考試完整筆記 ● 考點：</text:span><text:span text:style-name="T6">110</text:span><text:span text:style-name="T5">地</text:span><text:span text:style-name="T6">Q4</text:span><text:span text:style-name="T5">、</text:span><text:span text:style-name="T6">111</text:span><text:span text:style-name="T5">地</text:span><text:span text:style-name="T6">Q4</text:span><text:span text:style-name="T5">、</text:span><text:span text:style-name="T6">113</text:span><text:span text:style-name="T5">地</text:span><text:span text:style-name="T6">Q3</text:span><text:span text:style-name="T5">、</text:span><text:span text:style-name="T6">114</text:span><text:span text:style-name="T5">地</text:span><text:span text:style-name="T6">Q2</text:span></text:p>
      <text:p text:style-name="P3"/>
      <text:h text:style-name="P4" text:outline-level="1" loext:marker-style-name="T7"><text:span text:style-name="T8">一、</text:span><text:span text:style-name="T9">Heap </text:span><text:span text:style-name="T8">的定義與兩大條件</text:span></text:h>
      <text:p text:style-name="P5" loext:marker-style-name="T10"><text:span text:style-name="T11">Heap</text:span><text:span text:style-name="T12">（堆積）是一種特殊的二元樹，必須同時滿足以下兩個條件，缺一不可：</text:span></text:p>
      <text:p text:style-name="P3"/>
      <text:h text:style-name="P6" text:outline-level="2" loext:marker-style-name="T13"><text:span text:style-name="T14">條件</text:span><text:span text:style-name="T15">1</text:span><text:span text:style-name="T14">：</text:span><text:span text:style-name="T15">Complete Binary Tree</text:span><text:span text:style-name="T14">（完全二元樹）</text:span></text:h>
      <text:list xml:id="list1858012492" text:style-name="WWNum5">
        <text:list-item text:start-value="1">
          <text:p text:style-name="P7" loext:marker-style-name="T16"><text:span text:style-name="T17">每一層節點都必須盡量填滿</text:span><text:span text:style-name="T18">。</text:span></text:p>
        </text:list-item>
        <text:list-item text:style-override="WWNum6">
          <text:p text:style-name="P8" loext:marker-style-name="T16"><text:span text:style-name="T19">最後一層</text:span><text:span text:style-name="T18">的節點必須</text:span><text:span text:style-name="T20">從左往右依序填入</text:span><text:span text:style-name="T18">，</text:span><text:span text:style-name="T21">不可跳過</text:span><text:span text:style-name="T18">。</text:span></text:p>
        </text:list-item>
      </text:list>
      <text:p text:style-name="P3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9" loext:marker-style-name="T22"><text:span text:style-name="T23">✅ </text:span><text:span text:style-name="T24">合法 </text:span><text:span text:style-name="T23">Complete Binary Tree</text:span><text:span text:style-name="T24">：</text:span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7"/>10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8"/>/ <text:s text:c="2"/>\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4"/>90 <text:s text:c="4"/>8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4"/>/ \ <text:s text:c="5"/>/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5"><text:span text:style-name="T26">70 <text:s/>60 50</text:span><text:span text:style-name="T25"/></text:p>
          </table:table-cell>
        </table:table-row>
        <table:table-row table:style-name="表格1.1">
          <table:table-cell table:style-name="表格1.A1" office:value-type="string">
            <text:p text:style-name="P9"/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❌ </text:span><text:span text:style-name="T24">不合法（左邊空著）：</text:span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7"/>10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8"/>/ <text:s text:c="2"/>\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4"/>90 <text:s text:c="4"/>8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8"/>\ <text:s text:c="2"/>/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6"/></text:span><text:span text:style-name="T26">60 50</text:span></text:p>
          </table:table-cell>
        </table:table-row>
      </table:table>
      <text:p text:style-name="P3"/>
      <text:h text:style-name="P6" text:outline-level="2" loext:marker-style-name="T13"><text:span text:style-name="T14">條件</text:span><text:span text:style-name="T15">2</text:span><text:span text:style-name="T14">：</text:span><text:span text:style-name="T15">Heap Property</text:span><text:span text:style-name="T14">（堆積性質）</text:span></text:h>
      <text:p text:style-name="P5" loext:marker-style-name="T10"><text:span text:style-name="T12">父節點與子節點之間必須滿足固定的大小關係，分為兩種：</text:span><text:span text:style-name="T10"/></text:p>
      <text:p text:style-name="P3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10" loext:marker-style-name="T27"><text:span text:style-name="T28">類型</text:span><text:span text:style-name="T27"/></text:p>
            </table:table-cell>
            <table:table-cell table:style-name="表格2.A1" office:value-type="string">
              <text:p text:style-name="P10" loext:marker-style-name="T27"><text:span text:style-name="T28">規則</text:span><text:span text:style-name="T27"/></text:p>
            </table:table-cell>
            <table:table-cell table:style-name="表格2.A1" office:value-type="string">
              <text:p text:style-name="P10" loext:marker-style-name="T27"><text:span text:style-name="T28">範例</text:span><text:span text:style-name="T27"/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0" loext:marker-style-name="T22"><text:span text:style-name="T29">Min</text:span><text:span text:style-name="T23"> Heap</text:span></text:p>
          </table:table-cell>
          <table:table-cell table:style-name="表格2.A2" office:value-type="string">
            <text:p text:style-name="P10" loext:marker-style-name="T22"><text:span text:style-name="T23">parent ≤ child</text:span><text:span text:style-name="T24">（</text:span><text:span text:style-name="T30">父小子大</text:span><text:span text:style-name="T24">）</text:span></text:p>
          </table:table-cell>
          <table:table-cell table:style-name="表格2.A2" office:value-type="string">
            <text:p text:style-name="P10" loext:marker-style-name="T22"><text:span text:style-name="T23">Root </text:span><text:span text:style-name="T24">必為最小值</text:span></text:p>
          </table:table-cell>
        </table:table-row>
        <table:table-row table:style-name="表格2.1">
          <table:table-cell table:style-name="表格2.A3" office:value-type="string">
            <text:p text:style-name="P10" loext:marker-style-name="T22"><text:span text:style-name="T31">Max</text:span><text:span text:style-name="T23"> Heap</text:span></text:p>
          </table:table-cell>
          <table:table-cell table:style-name="表格2.A3" office:value-type="string">
            <text:p text:style-name="P10" loext:marker-style-name="T22"><text:span text:style-name="T23">parent ≥ child</text:span><text:span text:style-name="T24">（</text:span><text:span text:style-name="T32">父大子小</text:span><text:span text:style-name="T24">）</text:span></text:p>
          </table:table-cell>
          <table:table-cell table:style-name="表格2.A3" office:value-type="string">
            <text:p text:style-name="P10" loext:marker-style-name="T22"><text:span text:style-name="T23">Root </text:span><text:span text:style-name="T24">必為最大值</text:span></text:p>
          </table:table-cell>
        </table:table-row>
      </table:table>
      <text:p text:style-name="P3"><text:soft-page-break/></text:p>
      <text:p text:style-name="P3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9" loext:marker-style-name="T22"><text:span text:style-name="T23">📌 </text:span><text:span text:style-name="T24">核心公式（必背）</text:span></text:p>
          </table:table-cell>
        </table:table-row>
        <table:table-row table:style-name="表格3.1">
          <table:table-cell table:style-name="表格3.A1" office:value-type="string">
            <text:p text:style-name="P9" loext:marker-style-name="T22"><text:span text:style-name="T26">Heap</text:span><text:span text:style-name="T23"> = </text:span><text:span text:style-name="T33">Complete Binary Tree + Heap Property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二、</text:span><text:span text:style-name="T9">Heap </text:span><text:span text:style-name="T8">的陣列表示法（</text:span><text:span text:style-name="T9">Implicit Array</text:span><text:span text:style-name="T8">）</text:span></text:h>
      <text:p text:style-name="P5" loext:marker-style-name="T10"><text:span text:style-name="T12">由於 </text:span><text:span text:style-name="T34">Heap </text:span><text:span text:style-name="T35">是 </text:span><text:span text:style-name="T34">Complete Binary Tree</text:span><text:span text:style-name="T12">，</text:span><text:span text:style-name="T36">節點位置完全可預測</text:span><text:span text:style-name="T12">，因此不需要指標（</text:span><text:span text:style-name="T11">pointer</text:span><text:span text:style-name="T12">），直接用陣列儲存即可，這稱為 </text:span><text:span text:style-name="T11">Implicit Array</text:span><text:span text:style-name="T12">（隱式陣列）。</text:span></text:p>
      <text:p text:style-name="P3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9" loext:marker-style-name="T22"><text:span text:style-name="T24">【索引公式 — 考試必背】</text:span><text:span text:style-name="T22"/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Root <text:s text:c="5"/>→ A[1]</text:span><text:span text:style-name="T22"/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</text:span><text:span text:style-name="T37">Parent</text:span><text:span text:style-name="T23"> <text:s text:c="3"/>→ A[</text:span><text:span text:style-name="T38">i / 2</text:span><text:span text:style-name="T23">] <text:s text:c="5"/></text:span><text:span text:style-name="T24">（整數除法）</text:span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</text:span><text:span text:style-name="T39">Left child</text:span><text:span text:style-name="T23"> → A[</text:span><text:span text:style-name="T40">2i</text:span><text:span text:style-name="T23">] <text:s text:c="6"/></text:span><text:span text:style-name="T24">（</text:span><text:span text:style-name="T41">多生貴子</text:span><text:span text:style-name="T24">）</text:span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</text:span><text:span text:style-name="T39">Right child</text:span><text:span text:style-name="T23"> → A[</text:span><text:span text:style-name="T40">2i + 1</text:span><text:span text:style-name="T23">]</text:span></text:p>
          </table:table-cell>
        </table:table-row>
      </table:table>
      <text:p text:style-name="P3"/>
      <text:h text:style-name="P6" text:outline-level="2" loext:marker-style-name="T13"><text:span text:style-name="T14">範例</text:span><text:span text:style-name="T13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9" loext:marker-style-name="T22"><text:span text:style-name="T24">樹狀結構：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8"/>10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7"/>/ <text:s text:c="2"/>\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5"/>90 <text:s text:c="4"/>8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5"/>/ \ <text:s text:c="4"/>/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/>70 <text:s/>60 5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4">陣列儲存：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2"/>Index: <text:s/>1 <text:s text:c="3"/>2 <text:s text:c="3"/>3 <text:s text:c="3"/>4 <text:s text:c="3"/>5 <text:s text:c="3"/>6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2"/>Value: 100 <text:s text:c="2"/>90 <text:s text:c="2"/>80 <text:s text:c="2"/>70 <text:s text:c="2"/>60 <text:s text:c="2"/>5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4">驗證：</text:span><text:span text:style-name="T23">A[5] = 60</text:span><text:span text:style-name="T24">，</text:span><text:span text:style-name="T42">Parent = A[5/2] = A[2] </text:span><text:span text:style-name="T23">= 90 ✅</text:span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6"/></text:span><text:span text:style-name="T43">Left child = A[10]</text:span><text:span text:style-name="T24">，</text:span><text:span text:style-name="T44">Right child = A[11]</text:span><text:span text:style-name="T24">（皆為空）</text:span></text:p>
          </table:table-cell>
        </table:table-row>
      </table:table>
      <text:p text:style-name="P3"/>
      <text:p text:style-name="P3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9" loext:marker-style-name="T22"><text:span text:style-name="T23">⚠️ <text:s/></text:span><text:span text:style-name="T24">考試陷阱：</text:span><text:span text:style-name="T45">陣列索引從 </text:span><text:span text:style-name="T38">1 </text:span><text:span text:style-name="T45">開始</text:span><text:span text:style-name="T24">，</text:span><text:span text:style-name="T19">不是 </text:span><text:span text:style-name="T26">0</text:span><text:span text:style-name="T24">。</text:span></text:p>
          </table:table-cell>
        </table:table-row>
        <table:table-row table:style-name="表格6.1">
          <table:table-cell table:style-name="表格6.A1" office:value-type="string">
            <text:p text:style-name="P9" loext:marker-style-name="T22"><text:span text:style-name="T23"><text:s text:c="5"/></text:span><text:span text:style-name="T24">若從 </text:span><text:span text:style-name="T23">0 </text:span><text:span text:style-name="T24">開始則公式不同：</text:span><text:span text:style-name="T23">parent=(i-1)/2, left=2i+1, right=2i+2</text:span><text:span text:style-name="T24">。</text:span></text:p>
          </table:table-cell>
        </table:table-row>
        <table:table-row table:style-name="表格6.1">
          <table:table-cell table:style-name="表格6.A1" office:value-type="string">
            <text:p text:style-name="P9" loext:marker-style-name="T22"><text:span text:style-name="T23"><text:s text:c="5"/></text:span><text:span text:style-name="T24">考題若未特別說明，</text:span><text:span text:style-name="T46">預設從 </text:span><text:span text:style-name="T47">1 </text:span><text:span text:style-name="T46">開始</text:span><text:span text:style-name="T24">。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三、</text:span><text:span text:style-name="T9">Heap </text:span><text:span text:style-name="T8">的核心操作與時間複雜度</text:span></text:h>
      <text:h text:style-name="P6" text:outline-level="2" loext:marker-style-name="T13"><text:span text:style-name="T15">3-1 </text:span><text:span text:style-name="T14">插入（</text:span><text:span text:style-name="T15">Insert</text:span><text:span text:style-name="T14">）— </text:span><text:span text:style-name="T15">Bubble Up</text:span><text:span text:style-name="T14">（向上浮）</text:span></text:h>
      <text:p text:style-name="P5" loext:marker-style-name="T10"><text:span text:style-name="T12">步驟：</text:span><text:span text:style-name="T10"/></text:p>
      <text:list xml:id="list185811747732177" text:continue-list="list1858012492" text:style-name="WWNum7">
        <text:list-item>
          <text:p text:style-name="P11" loext:marker-style-name="T16"><text:span text:style-name="T48">Step 1</text:span><text:span text:style-name="T18">：</text:span><text:span text:style-name="T49">將新元素放到陣列最後一個位置</text:span><text:span text:style-name="T18">（</text:span><text:span text:style-name="T48">Complete Binary Tree </text:span><text:span text:style-name="T18">的下一個</text:span><text:span text:style-name="T19">空位</text:span><text:span text:style-name="T18">）。</text:span></text:p>
        </text:list-item>
        <text:list-item text:style-override="WWNum8">
          <text:p text:style-name="P12" loext:marker-style-name="T16"><text:span text:style-name="T48">Step 2</text:span><text:span text:style-name="T18">：</text:span><text:span text:style-name="T50">與父節點比較</text:span><text:span text:style-name="T18">，若違反 </text:span><text:span text:style-name="T48">Heap Property</text:span><text:span text:style-name="T18">，則交換。</text:span></text:p>
        </text:list-item>
        <text:list-item text:style-override="WWNum9">
          <text:p text:style-name="P13" loext:marker-style-name="T16"><text:span text:style-name="T48">Step 3</text:span><text:span text:style-name="T18">：重複 </text:span><text:span text:style-name="T48">Step 2</text:span><text:span text:style-name="T18">，一路往上，直到滿足 </text:span><text:span text:style-name="T48">Heap Property </text:span><text:span text:style-name="T18">或抵達 </text:span><text:span text:style-name="T48">Root </text:span><text:span text:style-name="T18">為止。</text:span></text:p>
        </text:list-item>
      </text:list>
      <text:p text:style-name="P3"/>
      <text:p text:style-name="P14" loext:marker-style-name="T51"><text:span text:style-name="T52">完整範例：</text:span><text:span text:style-name="T53">Max Heap </text:span><text:span text:style-name="T52">插入 </text:span><text:span text:style-name="T53">95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9" loext:marker-style-name="T22"><text:span text:style-name="T24">原始 </text:span><text:span text:style-name="T23">Max Heap</text:span><text:span text:style-name="T24">：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8"/>10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7"/>/ <text:s text:c="2"/>\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6"/>90 <text:s text:c="3"/>8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5"/>/ <text:s/>\ <text:s text:c="3"/>/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70 <text:s/>60 5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4">陣列：</text:span><text:span text:style-name="T23">[100, 90, 80, 70, 60, 50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Step 1</text:span><text:span text:style-name="T24">：</text:span><text:span text:style-name="T19">插入 </text:span><text:span text:style-name="T26">95</text:span><text:span text:style-name="T23"> → </text:span><text:span text:style-name="T30">放到 </text:span><text:span text:style-name="T54">index 7</text:span><text:span text:style-name="T30">（最後）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4">陣列：</text:span><text:span text:style-name="T23">[100, 90, 80, 70, 60, 50, 95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Step 2</text:span><text:span text:style-name="T24">：</text:span><text:span text:style-name="T55">95 </text:span><text:span text:style-name="T56">的 </text:span><text:span text:style-name="T55">parent = A[7/2] = A[3]</text:span><text:span text:style-name="T23"> = 80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8"/></text:span><text:span text:style-name="T26">95 &gt; 80</text:span><text:span text:style-name="T23"> → </text:span><text:span text:style-name="T24">違反 </text:span><text:span text:style-name="T23">Max Heap → </text:span><text:span text:style-name="T57">交換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4">陣列：</text:span><text:span text:style-name="T23">[100, 90, </text:span><text:span text:style-name="T58">95</text:span><text:span text:style-name="T23">, 70, 60, 50, </text:span><text:span text:style-name="T58">80</text:span><text:span text:style-name="T23">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Step 3</text:span><text:span text:style-name="T24">：</text:span><text:span text:style-name="T55">95 </text:span><text:span text:style-name="T56">的 </text:span><text:span text:style-name="T55">parent = A[3/2] = A[1]</text:span><text:span text:style-name="T23"> = 100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7"/></text:span><text:span text:style-name="T26"><text:s/>95 &lt; 100</text:span><text:span text:style-name="T23"> → </text:span><text:span text:style-name="T24">符合 </text:span><text:span text:style-name="T23">Max Heap → </text:span><text:span text:style-name="T57">停止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ext:soft-page-break/>
        <table:table-row table:style-name="表格7.1">
          <table:table-cell table:style-name="表格7.A1" office:value-type="string">
            <text:p text:style-name="P9" loext:marker-style-name="T22"><text:span text:style-name="T24">最終結果：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8"/>10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7"/>/ <text:s text:c="2"/>\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5"/>90 <text:s text:c="3"/>95</text:span></text:p>
          </table:table-cell>
        </table:table-row>
        <table:table-row table:style-name="表格7.1">
          <table:table-cell table:style-name="表格7.A1" office:value-type="string">
            <text:p text:style-name="P15" loext:marker-style-name="T22"><text:span text:style-name="T23"><text:s text:c="5"/>/ <text:s/>\ <text:s text:c="2"/>/</text:span><text:span text:style-name="T22"> <text:s text:c="2"/>\</text:span></text:p>
          </table:table-cell>
        </table:table-row>
        <table:table-row table:style-name="表格7.1">
          <table:table-cell table:style-name="表格7.A1" office:value-type="string">
            <text:p text:style-name="P16" loext:marker-style-name="T22"><text:s/><text:span text:style-name="T23">70 <text:s/>60 50 <text:s/>80</text:span></text:p>
          </table:table-cell>
        </table:table-row>
      </table:table>
      <text:p text:style-name="P3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9" loext:marker-style-name="T22"><text:span text:style-name="T24">時間複雜度：</text:span><text:span text:style-name="T23">O(log n) <text:s/>← </text:span><text:span text:style-name="T24">最多往上走樹高（</text:span><text:span text:style-name="T23">h = log₂n</text:span><text:span text:style-name="T24">）步</text:span></text:p>
          </table:table-cell>
        </table:table-row>
      </table:table>
      <text:p text:style-name="P3"/>
      <text:p text:style-name="P3"/>
      <text:h text:style-name="P6" text:outline-level="2" loext:marker-style-name="T13"><text:span text:style-name="T15">3-2 </text:span><text:span text:style-name="T59">刪除最大值</text:span><text:span text:style-name="T14">（</text:span><text:span text:style-name="T15">Delete / Extract-Max</text:span><text:span text:style-name="T14">）— </text:span><text:span text:style-name="T15">Heapify</text:span><text:span text:style-name="T14">（向下沉）</text:span></text:h>
      <text:p text:style-name="P5" loext:marker-style-name="T10"><text:span text:style-name="T12">步驟：</text:span><text:span text:style-name="T10"/></text:p>
      <text:list xml:id="list185812694923747" text:continue-list="list185811747732177" text:style-name="WWNum10">
        <text:list-item>
          <text:p text:style-name="P17" loext:marker-style-name="T16"><text:span text:style-name="T48">Step 1</text:span><text:span text:style-name="T18">：</text:span><text:span text:style-name="T49">取出 </text:span><text:span text:style-name="T60">Root</text:span><text:span text:style-name="T49">（最大值）</text:span><text:span text:style-name="T18">。</text:span></text:p>
        </text:list-item>
        <text:list-item text:style-override="WWNum11">
          <text:p text:style-name="P18" loext:marker-style-name="T16"><text:span text:style-name="T48">Step 2</text:span><text:span text:style-name="T18">：</text:span><text:span text:style-name="T61">將陣列最後一個元素移到 </text:span><text:span text:style-name="T39">Root </text:span><text:span text:style-name="T61">位置。</text:span></text:p>
        </text:list-item>
        <text:list-item text:style-override="WWNum12">
          <text:p text:style-name="P19" loext:marker-style-name="T16"><text:span text:style-name="T48">Step 3</text:span><text:span text:style-name="T18">：</text:span><text:span text:style-name="T50">與兩個子節點中</text:span><text:span text:style-name="T62">較大的</text:span><text:span text:style-name="T50">比較</text:span><text:span text:style-name="T18">，若違反 </text:span><text:span text:style-name="T48">Heap Property</text:span><text:span text:style-name="T18">，則交換。</text:span></text:p>
        </text:list-item>
        <text:list-item text:style-override="WWNum13">
          <text:p text:style-name="P20" loext:marker-style-name="T16"><text:span text:style-name="T48">Step 4</text:span><text:span text:style-name="T18">：重複 </text:span><text:span text:style-name="T48">Step 3</text:span><text:span text:style-name="T18">（</text:span><text:span text:style-name="T48">Heapify / Bubble Down</text:span><text:span text:style-name="T18">），一路往下，直到滿足條件或抵達葉節點。</text:span></text:p>
        </text:list-item>
      </text:list>
      <text:p text:style-name="P3"/>
      <text:p text:style-name="P14" loext:marker-style-name="T51"><text:span text:style-name="T52">完整範例：</text:span><text:span text:style-name="T53">Max Heap </text:span><text:span text:style-name="T52">刪除 </text:span><text:span text:style-name="T53">Root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9" loext:marker-style-name="T22"><text:span text:style-name="T24">原始 </text:span><text:span text:style-name="T23">Max Heap</text:span><text:span text:style-name="T24">：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10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 text:c="2"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90 <text:s text:c="3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 <text:s text:c="2"/>/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/>70 <text:s/>60 <text:s/>5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1</text:span><text:span text:style-name="T24">：取出 </text:span><text:span text:style-name="T23">Root = 10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2</text:span><text:span text:style-name="T24">：</text:span><text:span text:style-name="T45">把最後元素 </text:span><text:span text:style-name="T38">50 </text:span><text:span text:style-name="T45">移到 </text:span><text:span text:style-name="T38">Root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5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90 <text:s text:c="2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4"/>70 <text:s/>60</text:span><text:span text:style-name="T22"/></text:p>
          </table:table-cell>
        </table:table-row>
        <text:soft-page-break/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3</text:span><text:span text:style-name="T24">：</text:span><text:span text:style-name="T42">50 </text:span><text:span text:style-name="T63">的子節點 </text:span><text:span text:style-name="T42">90</text:span><text:span text:style-name="T63">、</text:span><text:span text:style-name="T42">80</text:span><text:span text:style-name="T63">，較大為 </text:span><text:span text:style-name="T42">9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50 &lt; 90 → </text:span><text:span text:style-name="T24">交換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50 <text:s text:c="2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4"/>70 <text:s/>6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4</text:span><text:span text:style-name="T24">：</text:span><text:span text:style-name="T42">50 </text:span><text:span text:style-name="T63">的子節點 </text:span><text:span text:style-name="T42">70</text:span><text:span text:style-name="T63">、</text:span><text:span text:style-name="T42">60</text:span><text:span text:style-name="T63">，較大為 </text:span><text:span text:style-name="T42">7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50 &lt; 70 → </text:span><text:span text:style-name="T24">交換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70 <text:s text:c="2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3"/>50 <text:s/>6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5</text:span><text:span text:style-name="T24">：</text:span><text:span text:style-name="T23">50 </text:span><text:span text:style-name="T24">已是葉節點 → 停止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4">最終陣列：</text:span><text:span text:style-name="T23">[90, 70, 80, 50, 60]</text:span></text:p>
          </table:table-cell>
        </table:table-row>
      </table:table>
      <text:p text:style-name="P3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9" loext:marker-style-name="T22"><text:span text:style-name="T64">時間複雜度：</text:span><text:span text:style-name="T58">O(log n) </text:span><text:span text:style-name="T23"><text:s/>← </text:span><text:span text:style-name="T24">最多往下走樹高（</text:span><text:span text:style-name="T23">h = log₂n</text:span><text:span text:style-name="T24">）步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四、建立 </text:span><text:span text:style-name="T65">Heap</text:span><text:span text:style-name="T8">（</text:span><text:span text:style-name="T9">Build Heap</text:span><text:span text:style-name="T8">）</text:span></text:h>
      <text:h text:style-name="P6" text:outline-level="2" loext:marker-style-name="T13"><text:span text:style-name="T14">方法 </text:span><text:span text:style-name="T66">A</text:span><text:span text:style-name="T14">：逐個插入法</text:span></text:h>
      <text:p text:style-name="P5" loext:marker-style-name="T67"><text:span text:style-name="T68">從</text:span><text:span text:style-name="T69">空</text:span><text:span text:style-name="T68"> </text:span><text:span text:style-name="T70">Heap</text:span><text:span text:style-name="T71"> </text:span><text:span text:style-name="T68">開始，呼叫 </text:span><text:span text:style-name="T72">n </text:span><text:span text:style-name="T73">次 </text:span><text:span text:style-name="T72">Insert</text:span><text:span text:style-name="T68">，每次 </text:span><text:span text:style-name="T74">O(log n)</text:span><text:span text:style-name="T68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9" loext:marker-style-name="T22"><text:span text:style-name="T75">總時間：</text:span><text:span text:style-name="T76">n × O(log n)</text:span><text:span text:style-name="T23"> = O(n log n)</text:span></text:p>
          </table:table-cell>
        </table:table-row>
      </table:table>
      <text:p text:style-name="P3"/>
      <text:h text:style-name="P6" text:outline-level="2" loext:marker-style-name="T13"><text:span text:style-name="T14">方法 </text:span><text:span text:style-name="T66">B</text:span><text:span text:style-name="T14">：</text:span><text:span text:style-name="T15">Bottom-Up Build Heap</text:span><text:span text:style-name="T14">（</text:span><text:span text:style-name="T15">Floyd</text:span><text:span text:style-name="T66"> </text:span><text:span text:style-name="T14">演算法）★考試重點★</text:span></text:h>
      <text:p text:style-name="P5" loext:marker-style-name="T67"><text:span text:style-name="T68">直接</text:span><text:span text:style-name="T77">將 </text:span><text:span text:style-name="T78">n </text:span><text:span text:style-name="T77">個元素放入陣列</text:span><text:span text:style-name="T68">，從</text:span><text:span text:style-name="T69">最後一個非葉節點（</text:span><text:span text:style-name="T79">index = ⌊n/2⌋</text:span><text:span text:style-name="T69">）開始</text:span><text:span text:style-name="T68">，</text:span><text:span text:style-name="T80">由下往上</text:span><text:span text:style-name="T68">逐一執行 </text:span><text:span text:style-name="T71">Heapify</text:span><text:span text:style-name="T68">。</text:span></text:p>
      <text:p text:style-name="P3"><text:soft-page-break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1" loext:marker-style-name="T81"><text:span text:style-name="T81">★ </text:span><text:span text:style-name="T82">為何從 <text:s text:c="2"/>?</text:span><text:span text:style-name="T81"> <text:s/>⌊n/2⌋ </text:span><text:span text:style-name="T82">開始？</text:span></text:p>
          </table:table-cell>
        </table:table-row>
        <table:table-row table:style-name="表格12.1">
          <table:table-cell table:style-name="表格12.A1" office:value-type="string">
            <text:p text:style-name="P9" loext:marker-style-name="T22"><text:span text:style-name="T38">index &gt; ⌊n/2⌋ </text:span><text:span text:style-name="T83">的節點全部都是葉節點</text:span><text:span text:style-name="T75">（</text:span><text:span text:style-name="T84">無子節點</text:span><text:span text:style-name="T75">），</text:span></text:p>
          </table:table-cell>
        </table:table-row>
        <table:table-row table:style-name="表格12.1">
          <table:table-cell table:style-name="表格12.A1" office:value-type="string">
            <text:p text:style-name="P9" loext:marker-style-name="T22"><text:span text:style-name="T75">葉節點本身已滿足 </text:span><text:span text:style-name="T23">Heap Property(</text:span><text:span text:style-name="T76">Heap Property</text:span><text:span text:style-name="T85">就是比較父節點</text:span><text:span text:style-name="T76">vs</text:span><text:span text:style-name="T85">子節點</text:span><text:span text:style-name="T75">；</text:span><text:span text:style-name="T86">葉節點沒有孩子 → 沒有東西可以比較 </text:span><text:span text:style-name="T24">→ 一定合法</text:span><text:span text:style-name="T75">。</text:span><text:span text:style-name="T23">)</text:span><text:span text:style-name="T75">，不需要 </text:span><text:span text:style-name="T23">Heapify</text:span><text:span text:style-name="T75">。</text:span></text:p>
          </table:table-cell>
        </table:table-row>
        <table:table-row table:style-name="表格12.1">
          <table:table-cell table:style-name="表格12.A1" office:value-type="string">
            <text:p text:style-name="P9" loext:marker-style-name="T22"><text:span text:style-name="T75">因此</text:span><text:span text:style-name="T87">只需從 </text:span><text:span text:style-name="T39">index ⌊n/2⌋ </text:span><text:span text:style-name="T87">往 </text:span><text:span text:style-name="T39">index 1 </text:span><text:span text:style-name="T87">逐一執行</text:span><text:span text:style-name="T75">。</text:span></text:p>
          </table:table-cell>
        </table:table-row>
      </table:table>
      <text:p text:style-name="P3"/>
      <text:p text:style-name="P22" loext:marker-style-name="T67"><text:span text:style-name="T88">範例：將 </text:span><text:span text:style-name="T89">[50, 30, 80, 10, 20, 70, 90] </text:span><text:span text:style-name="T88">建成 </text:span><text:span text:style-name="T89">Max Heap <text:s text:c="61"/></text:span></text:p>
      <text:p text:style-name="P22" loext:marker-style-name="T67"><text:span text:style-name="T89"/></text:p>
      <text:p text:style-name="P22" loext:marker-style-name="T67"><text:span text:style-name="T89">(</text:span><text:span text:style-name="T90">index = ⌊n/2⌋為最後一個非葉節點；index &gt; ⌊n/2⌋ 的節點全部都是葉節點</text:span><text:span text:style-name="T89">)</text:span></text:p>
      <text:p text:style-name="P3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9" loext:marker-style-name="T22"><text:span text:style-name="T75">初始陣列（</text:span><text:span text:style-name="T23">index </text:span><text:span text:style-name="T75">從 </text:span><text:span text:style-name="T23">1 </text:span><text:span text:style-name="T75">開始）：</text:span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index</text:span><text:span text:style-name="T75">： <text:s/></text:span><text:span text:style-name="T23">1 <text:s text:c="3"/>2 <text:s text:c="3"/>3 <text:s text:c="3"/>4 <text:s text:c="3"/>5 <text:s text:c="3"/>6 <text:s text:c="3"/>7</text:span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value</text:span><text:span text:style-name="T75">： <text:s/></text:span><text:span text:style-name="T23">50 <text:s text:c="2"/>30 <text:s text:c="2"/>80 <text:s text:c="2"/>10 <text:s text:c="2"/>20 <text:s text:c="2"/>70 <text:s text:c="2"/>90</text:span></text:p>
          </table:table-cell>
        </table:table-row>
        <table:table-row table:style-name="表格13.1">
          <table:table-cell table:style-name="表格13.A1" office:value-type="string">
            <text:p text:style-name="P9"/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6">n = 7</text:span><text:span text:style-name="T75">，</text:span><text:span text:style-name="T91">最後非葉節點 </text:span><text:span text:style-name="T92">index = ⌊7/2⌋ = 3</text:span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75">（</text:span><text:span text:style-name="T93">index 4</text:span><text:span text:style-name="T94">、</text:span><text:span text:style-name="T93">5</text:span><text:span text:style-name="T94">、</text:span><text:span text:style-name="T93">6</text:span><text:span text:style-name="T94">、</text:span><text:span text:style-name="T93">7 </text:span><text:span text:style-name="T94">皆為葉節點</text:span><text:span text:style-name="T75">，不需 </text:span><text:span text:style-name="T23">Heapify</text:span><text:span text:style-name="T75">）</text:span></text:p>
          </table:table-cell>
        </table:table-row>
        <table:table-row table:style-name="表格13.1">
          <table:table-cell table:style-name="表格13.A1" office:value-type="string">
            <text:p text:style-name="P9"/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75">初始樹狀結構：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13"/>50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12"/>/ <text:s/>\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8"/>30 <text:s text:c="3"/>80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7"/>/ \ <text:s text:c="6"/>/ \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3"/>10 <text:s/>20 70 <text:s/>90</text:span><text:span text:style-name="T22"/></text:p>
          </table:table-cell>
        </table:table-row>
      </table:table>
      <text:p text:style-name="P3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9" loext:marker-style-name="T22"><text:span text:style-name="T23">→</text:span><text:span text:style-name="T95"> </text:span><text:span text:style-name="T96">Heapify(3)</text:span><text:span text:style-name="T97">：</text:span><text:span text:style-name="T96">index 3 = 80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75">子節點：</text:span><text:span text:style-name="T23">index 6 = 70</text:span><text:span text:style-name="T75">，</text:span><text:span text:style-name="T23">index 7 = 90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58">Max Heap </text:span><text:span text:style-name="T98">要求父 ≥ 子</text:span><text:span text:style-name="T75">，但 </text:span><text:span text:style-name="T23">80 &lt; 90 → </text:span><text:span text:style-name="T75">違反！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80 </text:span><text:span text:style-name="T75">與 </text:span><text:span text:style-name="T23">90 </text:span><text:span text:style-name="T75">交換</text:span></text:p>
          </table:table-cell>
        </table:table-row>
        <table:table-row table:style-name="表格14.1">
          <table:table-cell table:style-name="表格14.A1" office:value-type="string">
            <text:p text:style-name="P9"/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75">交換後：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13"/>50</text:span><text:span text:style-name="T22"/></text:p>
          </table:table-cell>
        </table:table-row>
        <text:soft-page-break/>
        <table:table-row table:style-name="表格14.1">
          <table:table-cell table:style-name="表格14.A1" office:value-type="string">
            <text:p text:style-name="P9" loext:marker-style-name="T22"><text:span text:style-name="T23"><text:s text:c="13"/>/ <text:s/>\</text:span><text:span text:style-name="T22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8"/>30 <text:s text:c="3"/>90 <text:s text:c="5"/>← 90 </text:span><text:span text:style-name="T75">上來了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5"/>/ \ <text:s text:c="6"/>/ \</text:span><text:span text:style-name="T22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/>10 <text:s/>20 70 <text:s/>80</text:span><text:span text:style-name="T22"/></text:p>
          </table:table-cell>
        </table:table-row>
        <table:table-row table:style-name="表格14.1">
          <table:table-cell table:style-name="表格14.A1" office:value-type="string">
            <text:p text:style-name="P9"/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75">陣列：</text:span><text:span text:style-name="T23">[50, 30, 90, 10, 20, 70, 80]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80 </text:span><text:span text:style-name="T75">已是葉節點 → 停止</text:span></text:p>
          </table:table-cell>
        </table:table-row>
      </table:table>
      <text:p text:style-name="P3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9" loext:marker-style-name="T22"><text:span text:style-name="T23">→</text:span><text:span text:style-name="T96"> Heapify(2)</text:span><text:span text:style-name="T97">：</text:span><text:span text:style-name="T96">index 2 = 30</text:span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</text:span><text:span text:style-name="T75">子節點：</text:span><text:span text:style-name="T23">index 4 = 10</text:span><text:span text:style-name="T75">，</text:span><text:span text:style-name="T23">index 5 = 20</text:span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</text:span><text:span text:style-name="T54">30 ≥ 20 </text:span><text:span text:style-name="T99">且 </text:span><text:span text:style-name="T54">30 ≥ 10 → </text:span><text:span text:style-name="T99">符合 </text:span><text:span text:style-name="T54">Max Heap → </text:span><text:span text:style-name="T99">無需交換</text:span></text:p>
          </table:table-cell>
        </table:table-row>
        <table:table-row table:style-name="表格15.1">
          <table:table-cell table:style-name="表格15.A1" office:value-type="string">
            <text:p text:style-name="P9"/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</text:span><text:span text:style-name="T75">樹狀結構不變：</text:span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11"/>50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8"/>30 <text:s text:c="3"/>90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7"/>/ \ <text:s text:c="2"/>/ \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5"/>10 <text:s/>20 70 <text:s/>80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/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</text:span><text:span text:style-name="T75">陣列：</text:span><text:span text:style-name="T23">[50, 30, 90, 10, 20, 70, 80]</text:span></text:p>
          </table:table-cell>
        </table:table-row>
      </table:table>
      <text:p text:style-name="P3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9" loext:marker-style-name="T22"><text:span text:style-name="T23">→ </text:span><text:span text:style-name="T96">Heapify(1)</text:span><text:span text:style-name="T97">：</text:span><text:span text:style-name="T96">index 1 = 50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75">子節點：</text:span><text:span text:style-name="T23">index 2 = 30</text:span><text:span text:style-name="T75">，</text:span><text:span text:style-name="T23">index 3 = 90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83">較大子節點</text:span><text:span text:style-name="T75">為 </text:span><text:span text:style-name="T23">90 &gt; 50 → </text:span><text:span text:style-name="T26">50 </text:span><text:span text:style-name="T100">與 </text:span><text:span text:style-name="T26">90 </text:span><text:span text:style-name="T100">交換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75">第 </text:span><text:span text:style-name="T23">1 </text:span><text:span text:style-name="T75">步交換後：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1"/>90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8"/>30 <text:s text:c="3"/>50 <text:s text:c="5"/>← </text:span><text:span text:style-name="T101">50 </text:span><text:span text:style-name="T102">下沉到 </text:span><text:span text:style-name="T101">index 3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7"/>/ \ <text:s text:c="2"/>/ 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5"/>10 <text:s/>20 70 <text:s/>80</text:span><text:span text:style-name="T22"/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75">陣列：</text:span><text:span text:style-name="T23">[90, 30, 50, 10, 20, 70, 80]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60">50 </text:span><text:span text:style-name="T86">繼續下沉</text:span><text:span text:style-name="T75">：子節點 </text:span><text:span text:style-name="T23">index 6 = 70</text:span><text:span text:style-name="T75">，</text:span><text:span text:style-name="T23">index 7 = 80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83">較大子節點</text:span><text:span text:style-name="T75">為 </text:span><text:span text:style-name="T23">80 &gt; 50 → </text:span><text:span text:style-name="T26">50 </text:span><text:span text:style-name="T100">與 </text:span><text:span text:style-name="T26">80 </text:span><text:span text:style-name="T100">交換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75">第 </text:span><text:span text:style-name="T23">2 </text:span><text:span text:style-name="T75">步交換後：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1"/>90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8"/>30 <text:s text:c="3"/>80 <text:s text:c="5"/>← 80 </text:span><text:span text:style-name="T75">上來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7"/>/ \ <text:s text:c="6"/>/ 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4"/>10 <text:s/>20 70 <text:s/>50 <text:s text:c="3"/>← 50 </text:span><text:span text:style-name="T75">落到葉節點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50 </text:span><text:span text:style-name="T75">已是葉節點 → 停止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75">陣列：</text:span><text:span text:style-name="T23">[90, 30, 80, 10, 20, 70, 50]</text:span></text:p>
          </table:table-cell>
        </table:table-row>
      </table:table>
      <text:p text:style-name="P3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9" loext:marker-style-name="T22"><text:span text:style-name="T75">最終結果：</text:span><text:span text:style-name="T23">Max Heap ✓</text:span></text:p>
          </table:table-cell>
        </table:table-row>
        <table:table-row table:style-name="表格17.1">
          <table:table-cell table:style-name="表格17.A1" office:value-type="string">
            <text:p text:style-name="P9"/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11"/>90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8"/>30 <text:s text:c="3"/>80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7"/>/ \ <text:s text:c="6"/>/ \</text:span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3"/>10 <text:s/>20 70 <text:s/>50</text:span></text:p>
          </table:table-cell>
        </table:table-row>
        <table:table-row table:style-name="表格17.1">
          <table:table-cell table:style-name="表格17.A1" office:value-type="string">
            <text:p text:style-name="P9"/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75">陣列：</text:span><text:span text:style-name="T23">[90, 30, 80, 10, 20, 70, 50]</text:span></text:p>
          </table:table-cell>
        </table:table-row>
      </table:table>
      <text:p text:style-name="P3"/>
      <text:h text:style-name="P6" text:outline-level="2" loext:marker-style-name="T13"><text:span text:style-name="T66">★ </text:span><text:span text:style-name="T59">為何 </text:span><text:span text:style-name="T103">Bottom-Up Build Heap</text:span><text:span text:style-name="T104"> =</text:span><text:span text:style-name="T66"> </text:span><text:span text:style-name="T105">O(n)</text:span><text:span text:style-name="T14">？</text:span></text:h>
      <text:p text:style-name="P5" loext:marker-style-name="T67"><text:span text:style-name="T68">關鍵直覺：</text:span><text:span text:style-name="T80">每個節點 </text:span><text:span text:style-name="T106">Heapify </text:span><text:span text:style-name="T80">的代價 </text:span><text:span text:style-name="T106">= </text:span><text:span text:style-name="T80">它在樹中的「高度」</text:span><text:span text:style-name="T68">（</text:span><text:span text:style-name="T107">往下最多能走幾層</text:span><text:span text:style-name="T68">）。</text:span></text:p>
      <text:p text:style-name="P5" loext:marker-style-name="T67"><text:span text:style-name="T108">高度愈低的節點數量愈多，代價愈小；高度愈高的節點數量愈少，代價愈大</text:span><text:span text:style-name="T68">。</text:span><text:span text:style-name="T109">兩者相乘加總後收斂至 </text:span><text:span text:style-name="T74">O(n)</text:span><text:span text:style-name="T68">。</text:span></text:p>
      <text:p text:style-name="P3"/>
      <table:table table:name="表格18" table:style-name="表格18">
        <table:table-column table:style-name="表格18.A"/>
        <text:soft-page-break/>
        <table:table-row table:style-name="表格18.1">
          <table:table-cell table:style-name="表格18.A1" office:value-type="string">
            <text:p text:style-name="P9">★ 為何 Build Heap 是 O(n)？</text:p>
            <text:p text:style-name="P9"/>
            <text:p text:style-name="P9">Build Heap 由下往上<text:span text:style-name="T110">對每個非葉節點執行 Heapify</text:span>。</text:p>
            <text:p text:style-name="P9"/>
            <text:p text:style-name="P9">以完全二元樹為例：</text:p>
            <text:p text:style-name="P9"/>
            <text:p text:style-name="P9"><text:span text:style-name="T111">高度0（葉節點）約有 </text:span><text:span text:style-name="T112">n/2</text:span><text:span text:style-name="T111"> 個</text:span>，<text:span text:style-name="T113">每個最多移動 0 步</text:span></text:p>
            <text:p text:style-name="P9"><text:span text:style-name="T111">高度1 約有 </text:span><text:span text:style-name="T112">n/4</text:span><text:span text:style-name="T111"> 個</text:span>，<text:span text:style-name="T113">每個最多移動 1 步</text:span></text:p>
            <text:p text:style-name="P9"><text:span text:style-name="T111">高度2 約有 </text:span><text:span text:style-name="T112">n/8</text:span><text:span text:style-name="T111"> 個</text:span>，<text:span text:style-name="T113">每個最多移動 2 步</text:span></text:p>
            <text:p text:style-name="P9"><text:span text:style-name="T111">高度3 約有 </text:span><text:span text:style-name="T112">n/16</text:span><text:span text:style-name="T111"> 個</text:span>，<text:span text:style-name="T113">每個最多移動 3 步</text:span></text:p>
            <text:p text:style-name="P9">...</text:p>
            <text:p text:style-name="P9"/>
            <text:p text:style-name="P9">因此總成本為：</text:p>
            <text:p text:style-name="P9"/>
            <text:p text:style-name="P9">T(n) ≈ (n/2)×0</text:p>
            <text:p text:style-name="P9"/>
            <text:p text:style-name="P9">* (n/4)×1</text:p>
            <text:p text:style-name="P9">* (n/8)×2</text:p>
            <text:p text:style-name="P9">* (n/16)×3</text:p>
            <text:p text:style-name="P9">* ...</text:p>
            <text:p text:style-name="P9"/>
            <text:p text:style-name="P9">觀察可知：</text:p>
            <text:p text:style-name="P9"/>
            <text:p text:style-name="P23">越往上，Heapify 可能移動的步數增加 1，</text:p>
            <text:p text:style-name="P9"><text:span text:style-name="T114">但節點數量卻減少一半</text:span>。</text:p>
            <text:p text:style-name="P9"/>
            <text:p text:style-name="P9">例如：</text:p>
            <text:p text:style-name="P9"/>
            <text:p text:style-name="P9">高度1： (<text:span text:style-name="T113">n/4</text:span>)×<text:span text:style-name="T111">1</text:span></text:p>
            <text:p text:style-name="P9">高度2： (<text:span text:style-name="T113">n/8</text:span>)×<text:span text:style-name="T111">2</text:span></text:p>
            <text:p text:style-name="P9">高度3： (<text:span text:style-name="T113">n/16</text:span>)×<text:span text:style-name="T111">3</text:span></text:p>
            <text:p text:style-name="P9"/>
            <text:p text:style-name="P9">可以看到<text:span text:style-name="T115">節點數減少的速度比成本增加的速度更快</text:span>。</text:p>
            <text:p text:style-name="P9"/>
            <text:p text:style-name="P9">因此<text:span text:style-name="T116">所有層的成本加總後不會達到 O(n log n)，而是 O(n)</text:span>。</text:p>
            <text:p text:style-name="P9"/>
            <text:p text:style-name="P9">結論：</text:p>
            <text:p text:style-name="P9"/>
            <text:p text:style-name="P9"><text:span text:style-name="T117">葉節點很多，但幾乎不用移動</text:span>；</text:p>
            <text:p text:style-name="P9"><text:span text:style-name="T118">根附近節點雖然較貴，但數量很少</text:span>。</text:p>
            <text:p text:style-name="P9"/>
            <text:p text:style-name="P9"><text:span text:style-name="T116">所以 </text:span><text:span text:style-name="T119">Build Heap 的時間複雜度為 O(n)</text:span>。</text:p>
          </table:table-cell>
        </table:table-row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75">白話理解：</text:span><text:span text:style-name="T120">葉節點約佔一半，</text:span><text:span text:style-name="T121">Heapify </text:span><text:span text:style-name="T120">代價為 </text:span><text:span text:style-name="T121">0</text:span><text:span text:style-name="T75">；</text:span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9" loext:marker-style-name="T122"><text:span text:style-name="T123">往上每層節點數減半，代價只加 </text:span><text:span text:style-name="T122">1</text:span><text:span text:style-name="T123">。</text:span></text:p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124">整體工作量被大量葉節點的「零代價」攤平</text:span><text:span text:style-name="T75">，總代價 ∝ </text:span><text:span text:style-name="T23">n</text:span><text:span text:style-name="T75">。</text:span></text:p>
          </table:table-cell>
        </table:table-row>
      </table:table>
      <text:p text:style-name="P3"/>
      <table:table table:name="表格19" table:style-name="表格19">
        <table:table-column table:style-name="表格19.A" table:number-columns-repeated="3"/>
        <table:table-header-rows>
          <table:table-row table:style-name="表格19.1">
            <table:table-cell table:style-name="表格19.A1" office:value-type="string">
              <text:p text:style-name="P10" loext:marker-style-name="T27"><text:span text:style-name="T28">方法</text:span><text:span text:style-name="T27"/></text:p>
            </table:table-cell>
            <table:table-cell table:style-name="表格19.A1" office:value-type="string">
              <text:p text:style-name="P10" loext:marker-style-name="T27"><text:span text:style-name="T28">時間複雜度</text:span><text:span text:style-name="T27"/></text:p>
            </table:table-cell>
            <table:table-cell table:style-name="表格19.A1" office:value-type="string">
              <text:p text:style-name="P10" loext:marker-style-name="T27"><text:span text:style-name="T28">適用情境</text:span><text:span text:style-name="T27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10" loext:marker-style-name="T125"><text:span text:style-name="T126">逐個 </text:span><text:span text:style-name="T125">Insert</text:span></text:p>
          </table:table-cell>
          <table:table-cell table:style-name="表格19.A2" office:value-type="string">
            <text:p text:style-name="P10" loext:marker-style-name="T22"><text:span text:style-name="T23">O(</text:span><text:span text:style-name="T26">n log n</text:span><text:span text:style-name="T23">)</text:span></text:p>
          </table:table-cell>
          <table:table-cell table:style-name="表格19.A2" office:value-type="string">
            <text:p text:style-name="P10" loext:marker-style-name="T22"><text:span text:style-name="T75">動態逐一加入</text:span><text:span text:style-name="T22"/></text:p>
          </table:table-cell>
        </table:table-row>
        <table:table-row table:style-name="表格19.1">
          <table:table-cell table:style-name="表格19.A3" office:value-type="string">
            <text:p text:style-name="P10" loext:marker-style-name="T125"><text:span text:style-name="T125">Bottom-Up Build Heap</text:span><text:span text:style-name="T125"/></text:p>
          </table:table-cell>
          <table:table-cell table:style-name="表格19.A3" office:value-type="string">
            <text:p text:style-name="P10" loext:marker-style-name="T22"><text:span text:style-name="T23">O(</text:span><text:span text:style-name="T26">n</text:span><text:span text:style-name="T23">) ★</text:span></text:p>
          </table:table-cell>
          <table:table-cell table:style-name="表格19.A3" office:value-type="string">
            <text:p text:style-name="P10" loext:marker-style-name="T22"><text:span text:style-name="T75">一次性建立</text:span><text:span text:style-name="T22"/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五、</text:span><text:span text:style-name="T9">Heap Sort</text:span><text:span text:style-name="T8">（堆積排序）</text:span></text:h>
      <text:p text:style-name="P5" loext:marker-style-name="T67"><text:span text:style-name="T71">Heap Sort </text:span><text:span text:style-name="T68">利用 </text:span><text:span text:style-name="T71">Heap </text:span><text:span text:style-name="T68">結構進行排序，分為兩個階段：</text:span></text:p>
      <text:p text:style-name="P3"/>
      <text:list xml:id="list2020808128" text:style-name="WWNum2">
        <text:list-item>
          <text:p text:style-name="P24" loext:marker-style-name="T67"><text:span text:style-name="T71">Phase 1</text:span><text:span text:style-name="T68">：</text:span><text:span text:style-name="T127">Build Heap</text:span><text:span text:style-name="T71"> — </text:span><text:span text:style-name="T128">將原始陣列建成 </text:span><text:span text:style-name="T129">Max Heap</text:span><text:span text:style-name="T68">，時間 </text:span><text:span text:style-name="T71">O(n)</text:span><text:span text:style-name="T68">。</text:span></text:p>
        </text:list-item>
        <text:list-item>
          <text:p text:style-name="P24" loext:marker-style-name="T67"><text:span text:style-name="T71">Phase 2</text:span><text:span text:style-name="T68">：</text:span><text:span text:style-name="T69">反覆 </text:span><text:span text:style-name="T79">Extract-Max</text:span><text:span text:style-name="T71"> — </text:span><text:span text:style-name="T130">取出 </text:span><text:span text:style-name="T131">Root</text:span><text:span text:style-name="T130">（最大值），放到陣列末端</text:span><text:span text:style-name="T68">，</text:span><text:span text:style-name="T132">再 </text:span><text:span text:style-name="T70">Heapify</text:span><text:span text:style-name="T68">，重複 </text:span><text:span text:style-name="T133">n-1</text:span><text:span text:style-name="T71"> </text:span><text:span text:style-name="T68">次，每次 </text:span><text:span text:style-name="T71">O(</text:span><text:span text:style-name="T106">log n</text:span><text:span text:style-name="T71">)</text:span><text:span text:style-name="T68">。</text:span></text:p>
        </text:list-item>
      </text:list>
      <text:p text:style-name="P3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9" loext:marker-style-name="T22"><text:span text:style-name="T23">Heap Sort </text:span><text:span text:style-name="T75">總時間 </text:span><text:span text:style-name="T23">= O(</text:span><text:span text:style-name="T26">n</text:span><text:span text:style-name="T23">) + O(</text:span><text:span text:style-name="T26">n log n</text:span><text:span text:style-name="T23">) = O(</text:span><text:span text:style-name="T76">n log n</text:span><text:span text:style-name="T23">)</text:span></text:p>
          </table:table-cell>
        </table:table-row>
        <table:table-row table:style-name="表格20.1">
          <table:table-cell table:style-name="表格20.A1" office:value-type="string">
            <text:p text:style-name="P9" loext:marker-style-name="T22"><text:span text:style-name="T75">空間複雜度 </text:span><text:span text:style-name="T23">= O(1)</text:span><text:span text:style-name="T75">（</text:span><text:span text:style-name="T23">In-place</text:span><text:span text:style-name="T75">，不需額外陣列）</text:span></text:p>
          </table:table-cell>
        </table:table-row>
        <table:table-row table:style-name="表格20.1">
          <table:table-cell table:style-name="表格20.A1" office:value-type="string">
            <text:p text:style-name="P9" loext:marker-style-name="T22"><text:span text:style-name="T75">穩定性 </text:span><text:span text:style-name="T23">= </text:span><text:span text:style-name="T75">不穩定（</text:span><text:span text:style-name="T23">Unstable</text:span><text:span text:style-name="T75">）</text:span></text:p>
          </table:table-cell>
        </table:table-row>
      </table:table>
      <text:p text:style-name="P3"/>
      <text:p text:style-name="P5" loext:marker-style-name="T67"><text:span text:style-name="T88">範例：對 </text:span><text:span text:style-name="T89">[4, 2, 7, 1, 5] </text:span><text:span text:style-name="T88">排序</text:span></text:p>
      <text:p text:style-name="P3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9" loext:marker-style-name="T22"><text:span text:style-name="T23">Phase 1 — </text:span><text:span text:style-name="T125">Build Max Heap</text:span><text:span text:style-name="T75">：</text:span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75">原始：</text:span><text:span text:style-name="T23">[4, 2, 7, 1, 5]</text:span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6">n=5</text:span><text:span text:style-name="T75">，</text:span><text:span text:style-name="T134">最後非葉節點 </text:span><text:span text:style-name="T40">= </text:span><text:span text:style-name="T38">⌊5/2⌋ = 2</text:span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75">初始樹狀：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8"/>4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</text:span><text:span text:style-name="T38"><text:s/>2</text:span><text:span text:style-name="T23"> <text:s text:c="2"/>7</text:span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4"/>1 <text:s text:c="2"/>5</text:span><text:span text:style-name="T22"/></text:p>
          </table:table-cell>
        </table:table-row>
        <text:soft-page-break/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39">Heapify(2)</text:span><text:span text:style-name="T75">：</text:span><text:span text:style-name="T26">2 </text:span><text:span text:style-name="T100">的子節點 </text:span><text:span text:style-name="T26">1, 5</text:span><text:span text:style-name="T75">；</text:span><text:span text:style-name="T76">5 &gt; 2 → </text:span><text:span text:style-name="T85">交換</text:span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8"/>4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6"/>5 <text:s text:c="2"/>7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4"/>1 <text:s text:c="2"/>2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39">Heapify(1)</text:span><text:span text:style-name="T75">：</text:span><text:span text:style-name="T26">4 </text:span><text:span text:style-name="T100">的子節點 </text:span><text:span text:style-name="T26">5, 7</text:span><text:span text:style-name="T75">；</text:span><text:span text:style-name="T76">7 &gt; 4 → </text:span><text:span text:style-name="T85">交換</text:span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8"/>7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6"/>5 <text:s text:c="2"/>4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4"/>1 <text:s text:c="2"/>2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Max Heap </text:span><text:span text:style-name="T75">完成：</text:span><text:span text:style-name="T23">[7, 5, 4, 1, 2]</text:span></text:p>
          </table:table-cell>
        </table:table-row>
      </table:table>
      <text:p text:style-name="P3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9" loext:marker-style-name="T22"><text:span text:style-name="T23">Phase 2 — </text:span><text:span text:style-name="T135">反覆</text:span><text:span text:style-name="T75"> </text:span><text:span text:style-name="T38">Extract-Max</text:span><text:span text:style-name="T75">：</text:span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Step 1</text:span><text:span text:style-name="T75">：</text:span><text:span text:style-name="T136">取出 </text:span><text:span text:style-name="T137">Root=7</text:span><text:span text:style-name="T136">，末端 </text:span><text:span text:style-name="T137">2 </text:span><text:span text:style-name="T136">移到 </text:span><text:span text:style-name="T137">Root</text:span><text:span text:style-name="T75">，</text:span><text:span text:style-name="T138">Heapify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5, 2, 4, 1 |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5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6"/>2 <text:s text:c="2"/>4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5"/>/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4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Step 2</text:span><text:span text:style-name="T75">：</text:span><text:span text:style-name="T136">取出 </text:span><text:span text:style-name="T137">Root=5</text:span><text:span text:style-name="T136">，末端 </text:span><text:span text:style-name="T137">1 </text:span><text:span text:style-name="T136">移到 </text:span><text:span text:style-name="T137">Root</text:span><text:span text:style-name="T75">，</text:span><text:span text:style-name="T138">Heapify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4, 2, 1 | 5,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4</text:span><text:span text:style-name="T22"/></text:p>
          </table:table-cell>
        </table:table-row>
        <text:soft-page-break/>
        <table:table-row table:style-name="表格22.1">
          <table:table-cell table:style-name="表格22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6"/>2 <text:s text:c="2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Step 3</text:span><text:span text:style-name="T75">：</text:span><text:span text:style-name="T136">取出 </text:span><text:span text:style-name="T137">Root=4</text:span><text:span text:style-name="T136">，末端 </text:span><text:span text:style-name="T137">1 </text:span><text:span text:style-name="T136">移到 </text:span><text:span text:style-name="T137">Root</text:span><text:span text:style-name="T75">，</text:span><text:span text:style-name="T139">Heapify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2, 1 | 4, 5,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2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7"/>/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6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Step 4</text:span><text:span text:style-name="T75">：</text:span><text:span text:style-name="T136">取出 </text:span><text:span text:style-name="T137">Root=2</text:span><text:span text:style-name="T136">，末端 </text:span><text:span text:style-name="T137">1 </text:span><text:span text:style-name="T136">移到 </text:span><text:span text:style-name="T137">Root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1 | 2, 4, 5,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60"><text:span text:style-name="T86">最終排序（升冪）：</text:span><text:span text:style-name="T60">[1, 2, 4, 5, 7] ✓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六、優先佇列（</text:span><text:span text:style-name="T9">Priority Queue</text:span><text:span text:style-name="T8">）實作方式比較</text:span></text:h>
      <text:p text:style-name="P5" loext:marker-style-name="T67"><text:span text:style-name="T131">Priority Queue</text:span><text:span text:style-name="T130">（優先佇列）</text:span><text:span text:style-name="T68">是</text:span><text:span text:style-name="T107">每次取出「優先值最高」元素的資料結構</text:span><text:span text:style-name="T68">。三種常見實作比較：</text:span></text:p>
      <text:p text:style-name="P3"/>
      <table:table table:name="表格23" table:style-name="表格23">
        <table:table-column table:style-name="表格23.A" table:number-columns-repeated="3"/>
        <table:table-header-rows>
          <table:table-row table:style-name="表格23.1">
            <table:table-cell table:style-name="表格23.A1" office:value-type="string">
              <text:p text:style-name="P10" loext:marker-style-name="T27"><text:span text:style-name="T28">實作方式</text:span><text:span text:style-name="T27"/></text:p>
            </table:table-cell>
            <table:table-cell table:style-name="表格23.A1" office:value-type="string">
              <text:p text:style-name="P10" loext:marker-style-name="T27"><text:span text:style-name="T140">Insert</text:span><text:span text:style-name="T27"/></text:p>
            </table:table-cell>
            <table:table-cell table:style-name="表格23.A1" office:value-type="string">
              <text:p text:style-name="P25"><text:span text:style-name="T141">Extract-Max</text:span><text:span text:style-name="T142">（取最大）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10" loext:marker-style-name="T22"><text:span text:style-name="T126">排序好的</text:span><text:span text:style-name="T75">陣列</text:span></text:p>
          </table:table-cell>
          <table:table-cell table:style-name="表格23.A2" office:value-type="string">
            <text:p text:style-name="P10" loext:marker-style-name="T22"><text:span text:style-name="T23">O(n)</text:span><text:span text:style-name="T22"/></text:p>
          </table:table-cell>
          <table:table-cell table:style-name="表格23.A2" office:value-type="string">
            <text:p text:style-name="P10" loext:marker-style-name="T22"><text:span text:style-name="T23">O(1) <text:s/></text:span><text:span text:style-name="T75">取快插慢</text:span></text:p>
          </table:table-cell>
        </table:table-row>
        <table:table-row table:style-name="表格23.1">
          <table:table-cell table:style-name="表格23.A2" office:value-type="string">
            <text:p text:style-name="P10" loext:marker-style-name="T22"><text:span text:style-name="T126">未排序的</text:span><text:span text:style-name="T75">陣列</text:span></text:p>
          </table:table-cell>
          <table:table-cell table:style-name="表格23.A2" office:value-type="string">
            <text:p text:style-name="P10" loext:marker-style-name="T22"><text:span text:style-name="T23">O(1)</text:span><text:span text:style-name="T22"/></text:p>
          </table:table-cell>
          <table:table-cell table:style-name="表格23.A2" office:value-type="string">
            <text:p text:style-name="P10" loext:marker-style-name="T22"><text:span text:style-name="T23">O(n) <text:s/></text:span><text:span text:style-name="T75">插快取慢</text:span></text:p>
          </table:table-cell>
        </table:table-row>
        <table:table-row table:style-name="表格23.1">
          <table:table-cell table:style-name="表格23.A4" office:value-type="string">
            <text:p text:style-name="P10" loext:marker-style-name="T22"><text:span text:style-name="T23">Max Heap ★</text:span><text:span text:style-name="T22"/></text:p>
          </table:table-cell>
          <table:table-cell table:style-name="表格23.A4" office:value-type="string">
            <text:p text:style-name="P10" loext:marker-style-name="T76"><text:span text:style-name="T76">O(log n)</text:span><text:span text:style-name="T76"/></text:p>
          </table:table-cell>
          <table:table-cell table:style-name="表格23.A4" office:value-type="string">
            <text:p text:style-name="P10" loext:marker-style-name="T22"><text:span text:style-name="T39">O(log n)</text:span><text:span text:style-name="T23"> <text:s/></text:span><text:span text:style-name="T75">兩者均衡</text:span></text:p>
          </table:table-cell>
        </table:table-row>
      </table:table>
      <text:p text:style-name="P3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9" loext:marker-style-name="T22"><text:span text:style-name="T23">💡 </text:span><text:span text:style-name="T75">考試重點：</text:span></text:p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38">Heap </text:span><text:span text:style-name="T83">是 </text:span><text:span text:style-name="T38">Priority Queue </text:span><text:span text:style-name="T83">最常見的實作</text:span><text:span text:style-name="T75">，</text:span></text:p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75">原因是 </text:span><text:span text:style-name="T76">Insert </text:span><text:span text:style-name="T85">和 </text:span><text:span text:style-name="T76">Extract </text:span><text:span text:style-name="T85">都是 </text:span><text:span text:style-name="T76">O(log n)</text:span><text:span text:style-name="T75">，</text:span></text:p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75">是</text:span><text:span text:style-name="T86">三種方案中最均衡的折衷解</text:span><text:span text:style-name="T75">。</text:span></text:p>
          </table:table-cell>
        </table:table-row>
        <table:table-row table:style-name="表格24.1">
          <table:table-cell table:style-name="表格24.A1" office:value-type="string">
            <text:p text:style-name="P9"/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75">應用場景：印表機緩衝（高優先文件先印）、作業系統 </text:span><text:span text:style-name="T23">CPU </text:span><text:span text:style-name="T75">排程。</text:span></text:p>
          </table:table-cell>
        </table:table-row>
      </table:table>
      <text:p text:style-name="P3"/>
      <text:p text:style-name="P3"><text:soft-page-break/></text:p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9" loext:marker-style-name="T22"><text:span text:style-name="T23">① </text:span><text:span text:style-name="T126">排序好的</text:span><text:span text:style-name="T75">陣列（維持升冪）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Insert 50</text:span><text:span text:style-name="T75">：需找到正確位置並挪動元素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10, 30, 70, 8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</text:span><text:span text:style-name="T75">挪動 </text:span><text:span text:style-name="T23">70, 80 </text:span><text:span text:style-name="T75">後</text:span><text:span text:style-name="T23">: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10, 30, </text:span><text:span text:style-name="T58">50</text:span><text:span text:style-name="T23">, 70, 80] <text:s text:c="2"/>← </text:span><text:span text:style-name="T26">O(n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Extract-Max</text:span><text:span text:style-name="T75">：直接取末端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10, 30, 50, 70, 8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10, 30, 50, 70] <text:s text:c="2"/></text:span><text:span text:style-name="T75">取出 </text:span><text:span text:style-name="T23">80 <text:s text:c="2"/>←</text:span><text:span text:style-name="T26"> O(1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② </text:span><text:span text:style-name="T126">未排序的</text:span><text:span text:style-name="T75">陣列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Insert 50</text:span><text:span text:style-name="T75">：直接放末端，不管順序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80, 10, 30, 7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80, 10, 30, 70, 50] <text:s text:c="2"/>← </text:span><text:span text:style-name="T26">O(1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Extract-Max</text:span><text:span text:style-name="T75">：沒有順序，只能全部掃描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80, 10, 30, 70, 5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</text:span><text:span text:style-name="T75">掃描</text:span><text:span text:style-name="T23">: 80? 10? 30? 70? 50? <text:s/>→ </text:span><text:span text:style-name="T75">找到 </text:span><text:span text:style-name="T23">80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10, 30, 70, 50] <text:s text:c="2"/></text:span><text:span text:style-name="T75">取出 </text:span><text:span text:style-name="T23">80 <text:s text:c="2"/>← </text:span><text:span text:style-name="T26">O(n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③ Max Heap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Insert 50</text:span><text:span text:style-name="T75">：放末端，</text:span><text:span text:style-name="T23">Bubble Up </text:span><text:span text:style-name="T75">往上比較交換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9"/>80 <text:s text:c="16"/>8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9"/>/ <text:s/>\ <text:s text:c="15"/>/ <text:s text:c="2"/>\</text:span><text:span text:style-name="T22"/></text:p>
          </table:table-cell>
        </table:table-row>
        <text:soft-page-break/>
        <table:table-row table:style-name="表格25.1">
          <table:table-cell table:style-name="表格25.A1" office:value-type="string">
            <text:p text:style-name="P9" loext:marker-style-name="T22"><text:span text:style-name="T23"><text:s text:c="6"/>70 <text:s text:c="2"/>30 <text:s text:c="3"/>→ <text:s/>70 <text:s text:c="2"/>3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6"/>/ <text:s text:c="18"/>/ <text:s text:c="2"/>\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4"/>10 <text:s text:c="14"/>10 <text:s text:c="2"/>50 ← </text:span><text:span text:style-name="T60">50 </text:span><text:span text:style-name="T86">直接就合法，停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61"/></text:span><text:span text:style-name="T76">O(log n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Extract-Max</text:span><text:span text:style-name="T75">：</text:span><text:span text:style-name="T84">取出 </text:span><text:span text:style-name="T143">Root=80</text:span><text:span text:style-name="T75">，</text:span><text:span text:style-name="T82">末端</text:span><text:span text:style-name="T75"> </text:span><text:span text:style-name="T23">50 </text:span><text:span text:style-name="T82">補位</text:span><text:span text:style-name="T75">，</text:span><text:span text:style-name="T23">Heapify </text:span><text:span text:style-name="T75">往下交換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9"/>80 <text:s text:c="16"/>50 <text:s text:c="17"/>7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8"/>/ <text:s text:c="2"/>\ <text:s text:c="15"/>/ <text:s text:c="2"/>\ <text:s text:c="16"/>/ <text:s text:c="2"/>\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5"/>70 <text:s text:c="2"/>30 <text:s text:c="2"/>→ <text:s text:c="3"/>70 <text:s text:c="2"/>30 <text:s text:c="3"/>→ <text:s text:c="3"/>50 <text:s text:c="2"/>3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5"/>/ <text:s text:c="2"/>\ <text:s text:c="15"/>/ <text:s text:c="20"/>/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10 <text:s text:c="2"/>50 <text:s text:c="9"/>10 <text:s text:c="18"/>1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3"/></text:span><text:span text:style-name="T75">取出 </text:span><text:span text:style-name="T23">80 <text:s text:c="5"/>50 </text:span><text:span text:style-name="T75">移到 </text:span><text:span text:style-name="T23">Root <text:s text:c="4"/>Heapify </text:span><text:span text:style-name="T75">完成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57"/></text:span><text:span text:style-name="T76">O(log n)</text:span></text:p>
          </table:table-cell>
        </table:table-row>
      </table:table>
      <text:p text:style-name="P3"/>
      <text:h text:style-name="P26" text:outline-level="1" loext:marker-style-name="T144"><text:span text:style-name="T145">七、</text:span><text:span text:style-name="T144">Interval Heap</text:span><text:span text:style-name="T145">（區間堆積）【</text:span><text:span text:style-name="T144">110</text:span><text:span text:style-name="T145">地</text:span><text:span text:style-name="T144">Q4</text:span><text:span text:style-name="T145">】</text:span></text:h>
      <text:h text:style-name="P27" text:outline-level="2" loext:marker-style-name="T146"><text:span text:style-name="T146">7-1 <text:s/></text:span><text:span text:style-name="T147">問題起源：</text:span><text:span text:style-name="T148">普通 </text:span><text:span text:style-name="T149">Heap</text:span><text:span text:style-name="T146"> </text:span><text:span text:style-name="T150">只能快速取一端</text:span></text:h>
      <text:p text:style-name="P28" loext:marker-style-name="T151"><text:span text:style-name="T152">回顧你已學過的 </text:span><text:span text:style-name="T151">Max Heap</text:span><text:span text:style-name="T152">：</text:span></text:p>
      <text:p text:style-name="P29" loext:marker-style-name="T153"><text:span text:style-name="T153"><text:s text:c="11"/>100 <text:s text:c="6"/>← </text:span><text:span text:style-name="T154">Root</text:span><text:span text:style-name="T153"> = 全域最大值（</text:span><text:span text:style-name="T154">O(1) 取得</text:span><text:span text:style-name="T153">）</text:span></text:p>
      <text:p text:style-name="P30"><text:s text:c="10"/>/ <text:s text:c="3"/>\</text:p>
      <text:p text:style-name="P31" loext:marker-style-name="T153"><text:span text:style-name="T153"><text:s text:c="8"/>90 <text:s text:c="5"/>80</text:span><text:span text:style-name="T153"/></text:p>
      <text:p text:style-name="P31" loext:marker-style-name="T153"><text:span text:style-name="T153"><text:s text:c="7"/>/ <text:s/>\</text:span><text:span text:style-name="T153"/></text:p>
      <text:p text:style-name="P31" loext:marker-style-name="T153"><text:span text:style-name="T153"><text:s text:c="6"/>70 <text:s text:c="2"/>60</text:span><text:span text:style-name="T153"/></text:p>
      <text:p text:style-name="P31"/>
      <text:p text:style-name="P31" loext:marker-style-name="T153"><text:span text:style-name="T153"><text:s text:c="2"/>Find-Max <text:s/>= O(1) <text:s/>直接</text:span><text:span text:style-name="T154">看 Root</text:span></text:p>
      <text:p text:style-name="P32" loext:marker-style-name="T153"><text:span text:style-name="T153"><text:s text:c="2"/></text:span><text:span text:style-name="T155">Find-Min <text:s/>= O(n)</text:span><text:span text:style-name="T153"> <text:s/></text:span><text:span text:style-name="T156">最小值藏在某個葉節點，不知在哪，</text:span><text:span text:style-name="T157">只能全掃</text:span></text:p>
      <text:p text:style-name="P33"/>
      <text:p text:style-name="P28" loext:marker-style-name="T151"><text:span text:style-name="T151">Max Heap </text:span><text:span text:style-name="T152">有一個致命弱點：</text:span></text:p>
      <text:list text:style-name="WWNum14">
        <text:list-item>
          <text:p text:style-name="P34" loext:marker-style-name="T151"><text:span text:style-name="T152">取最大值 → </text:span><text:span text:style-name="T151">O(1)</text:span><text:span text:style-name="T152">，非常快，因為 </text:span><text:span text:style-name="T151">Root </text:span><text:span text:style-name="T152">就是最大值。</text:span></text:p>
        </text:list-item>
        <text:list-item>
          <text:p text:style-name="P34" loext:marker-style-name="T151"><text:span text:style-name="T158">取最小值 → </text:span><text:span text:style-name="T159">O(n)</text:span><text:span text:style-name="T152">，</text:span><text:span text:style-name="T160">非常慢，因為最小值可能藏在任何一個葉節點，沒有規律可循。</text:span></text:p>
        </text:list-item>
      </text:list>
      <text:p text:style-name="P33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33" loext:marker-style-name="T161"><text:span text:style-name="T161">❓ </text:span><text:span text:style-name="T162">想一想：最小值在哪裡？</text:span></text:p>
            <text:p text:style-name="P33" loext:marker-style-name="T163"><text:span text:style-name="T164">以上面的 </text:span><text:span text:style-name="T163">Max Heap </text:span><text:span text:style-name="T164">為例，最小值 </text:span><text:span text:style-name="T163">60 </text:span><text:span text:style-name="T164">藏在葉節點。</text:span></text:p>
            <text:p text:style-name="P35" loext:marker-style-name="T163"><text:span text:style-name="T164">如果樹有 </text:span><text:span text:style-name="T163">n </text:span><text:span text:style-name="T164">個節點，不掃到最後一層根本不知道最小值在哪。</text:span></text:p>
          </table:table-cell>
        </table:table-row>
      </table:table>
      <text:p text:style-name="P36"><text:soft-page-break/></text:p>
      <text:h text:style-name="P27" text:outline-level="2" loext:marker-style-name="T146"><text:span text:style-name="T146">7-2 <text:s/></text:span><text:span text:style-name="T148">現實需求</text:span><text:span text:style-name="T147">：</text:span><text:span text:style-name="T150">兩端都要快</text:span></text:h>
      <text:p text:style-name="P28" loext:marker-style-name="T151"><text:span text:style-name="T152">在</text:span><text:span text:style-name="T165">很多實際應用中</text:span><text:span text:style-name="T152">，我們</text:span><text:span text:style-name="T166">同時需要快速取出最大值和最小值</text:span><text:span text:style-name="T152">：</text:span></text:p>
      <text:p text:style-name="P33"/>
      <text:p text:style-name="P29" loext:marker-style-name="T153"><text:span text:style-name="T153"><text:s text:c="2"/>📈 股票交易系統：</text:span><text:span text:style-name="T153"/></text:p>
      <text:p text:style-name="P31" loext:marker-style-name="T153"><text:span text:style-name="T153"><text:s text:c="7"/>→ 最高價（最大值）O(1) 快速取得</text:span><text:span text:style-name="T153"/></text:p>
      <text:p text:style-name="P31" loext:marker-style-name="T153"><text:span text:style-name="T153"><text:s text:c="7"/>→ 最低價（最小值）O(1) 快速取得</text:span><text:span text:style-name="T153"/></text:p>
      <text:p text:style-name="P31"/>
      <text:p text:style-name="P31" loext:marker-style-name="T153"><text:span text:style-name="T153"><text:s text:c="2"/>🖥️ <text:s/>CPU 排程器（雙優先權模式）：</text:span><text:span text:style-name="T153"/></text:p>
      <text:p text:style-name="P31" loext:marker-style-name="T153"><text:span text:style-name="T153"><text:s text:c="7"/>→ 最高優先權工作 <text:s/>→ 優先執行</text:span><text:span text:style-name="T153"/></text:p>
      <text:p text:style-name="P31" loext:marker-style-name="T153"><text:span text:style-name="T153"><text:s text:c="7"/>→ 最低優先權工作 <text:s/>→ 必要時踢出讓位</text:span><text:span text:style-name="T153"/></text:p>
      <text:p text:style-name="P31"/>
      <text:p text:style-name="P31" loext:marker-style-name="T153"><text:span text:style-name="T153"><text:s text:c="2"/>❌ </text:span><text:span text:style-name="T154">普通 Max Heap</text:span><text:span text:style-name="T153"> 做不到：</text:span><text:span text:style-name="T167">找最小值要</text:span><text:span text:style-name="T157"> O(n)</text:span></text:p>
      <text:p text:style-name="P32" loext:marker-style-name="T153"><text:span text:style-name="T153"><text:s text:c="2"/>❌ </text:span><text:span text:style-name="T154">普通 Min Heap</text:span><text:span text:style-name="T153"> 做不到：</text:span><text:span text:style-name="T167">找最大值要</text:span><text:span text:style-name="T157"> O(n)</text:span></text:p>
      <text:p text:style-name="P33"/>
      <text:p text:style-name="P28" loext:marker-style-name="T151"><text:span text:style-name="T152">這類需求稱為 </text:span><text:span text:style-name="T151">Double-Ended Priority Queue</text:span><text:span text:style-name="T152">（</text:span><text:span text:style-name="T151">DEPQ</text:span><text:span text:style-name="T152">，</text:span><text:span text:style-name="T168">雙端優先佇列</text:span><text:span text:style-name="T152">），</text:span><text:span text:style-name="T160">目標是</text:span><text:span text:style-name="T152">：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33" loext:marker-style-name="T161"><text:span text:style-name="T161">Extract-Min</text:span><text:span text:style-name="T162">（</text:span><text:span text:style-name="T169">取出最小值</text:span><text:span text:style-name="T162">）</text:span><text:span text:style-name="T161">= </text:span><text:span text:style-name="T170">O(log n)</text:span></text:p>
            <text:p text:style-name="P35" loext:marker-style-name="T161"><text:span text:style-name="T161">Extract-Max</text:span><text:span text:style-name="T162">（</text:span><text:span text:style-name="T169">取出最大值</text:span><text:span text:style-name="T162">）</text:span><text:span text:style-name="T161">= </text:span><text:span text:style-name="T170">O(log n)</text:span></text:p>
          </table:table-cell>
        </table:table-row>
      </table:table>
      <text:p text:style-name="P36"/>
      <text:h text:style-name="P27" text:outline-level="2" loext:marker-style-name="T146"><text:span text:style-name="T146">7-3 <text:s/>Interval Heap </text:span><text:span text:style-name="T147">的核心設計</text:span></text:h>
      <text:p text:style-name="P28" loext:marker-style-name="T151"><text:span text:style-name="T171">Interval Heap </text:span><text:span text:style-name="T172">的靈感</text:span><text:span text:style-name="T152">：</text:span><text:span text:style-name="T160">把 </text:span><text:span text:style-name="T173">Min Heap </text:span><text:span text:style-name="T160">和 </text:span><text:span text:style-name="T173">Max Heap</text:span><text:span text:style-name="T174">「疊」在同一棵樹上</text:span><text:span text:style-name="T152">。</text:span></text:p>
      <text:p text:style-name="P28" loext:marker-style-name="T151"><text:span text:style-name="T175">具體做法：</text:span><text:span text:style-name="T176">每個節點不再存一個值</text:span><text:span text:style-name="T152">，</text:span><text:span text:style-name="T166">改成存一個「區間」</text:span><text:span text:style-name="T177">[min_val, max_val]</text:span><text:span text:style-name="T152">：</text:span></text:p>
      <text:p text:style-name="P29" loext:marker-style-name="T153"><text:span text:style-name="T153"><text:s text:c="2"/></text:span><text:span text:style-name="T178">普通</text:span><text:span text:style-name="T153"> Heap 節點： <text:s text:c="9"/>Interval Heap 節點：</text:span></text:p>
      <text:p text:style-name="P31" loext:marker-style-name="T153"><text:span text:style-name="T153"><text:s text:c="7"/></text:span><text:span text:style-name="T154">80</text:span><text:span text:style-name="T153"> <text:s text:c="23"/></text:span><text:span text:style-name="T154">[20, 80]</text:span></text:p>
      <text:p text:style-name="P30"><text:s text:c="34"/>左值 <text:s/>右值</text:p>
      <text:p text:style-name="P31" loext:marker-style-name="T153"><text:span text:style-name="T153"><text:s text:c="30"/>（小的） <text:s/>（大的）</text:span><text:span text:style-name="T153"/></text:p>
      <text:p text:style-name="P31"/>
      <text:p text:style-name="P32" loext:marker-style-name="T153"><text:span text:style-name="T153"><text:s text:c="2"/>規則：</text:span><text:span text:style-name="T179">每個節點的 左值 ≤ 右值</text:span><text:span text:style-name="T180"> </text:span><text:span text:style-name="T153">（必須成立）</text:span></text:p>
      <text:p text:style-name="P33"/>
      <text:p text:style-name="P28" loext:marker-style-name="T151"><text:span text:style-name="T181">兩個 </text:span><text:span text:style-name="T182">Heap </text:span><text:span text:style-name="T181">的同時維護</text:span><text:span text:style-name="T152">：</text:span></text:p>
      <text:list text:continue-numbering="true" text:style-name="WWNum14">
        <text:list-item>
          <text:p text:style-name="P34" loext:marker-style-name="T151"><text:span text:style-name="T165">所有節點的</text:span><text:span text:style-name="T183">左</text:span><text:span text:style-name="T165">值（</text:span><text:span text:style-name="T184">min </text:span><text:span text:style-name="T165">端）</text:span><text:span text:style-name="T152">— 自上而下形成一個 </text:span><text:span text:style-name="T185">Min Heap</text:span></text:p>
        </text:list-item>
        <text:list-item>
          <text:p text:style-name="P34" loext:marker-style-name="T151"><text:span text:style-name="T165">所有節點的</text:span><text:span text:style-name="T186">右</text:span><text:span text:style-name="T165">值（</text:span><text:span text:style-name="T184">max </text:span><text:span text:style-name="T165">端</text:span><text:span text:style-name="T152">）— 自上而下形成一個 </text:span><text:span text:style-name="T187">Max Heap</text:span></text:p>
        </text:list-item>
      </text:list>
      <text:p text:style-name="P33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33" loext:marker-style-name="T161"><text:span text:style-name="T161">Interval Heap = </text:span><text:span text:style-name="T188">Min Heap</text:span><text:span text:style-name="T189">（左值）</text:span><text:span text:style-name="T161">+</text:span><text:span text:style-name="T187"> Max Heap</text:span><text:span text:style-name="T190">（右值）</text:span><text:span text:style-name="T191">同時疊在一棵樹上</text:span></text:p>
          </table:table-cell>
        </table:table-row>
      </table:table>
      <text:p text:style-name="P36"/>
      <text:h text:style-name="P27" text:outline-level="2" loext:marker-style-name="T146"><text:span text:style-name="T146">7-4 <text:s/></text:span><text:span text:style-name="T147">整棵樹的結構解析</text:span></text:h>
      <text:p text:style-name="P29" loext:marker-style-name="T153"><text:span text:style-name="T153"><text:s text:c="14"/>[</text:span><text:span text:style-name="T178">10</text:span><text:span text:style-name="T153">, </text:span><text:span text:style-name="T192">100</text:span><text:span text:style-name="T153">] <text:s text:c="9"/>← Root</text:span></text:p>
      <text:p text:style-name="P31" loext:marker-style-name="T153"><text:span text:style-name="T153"><text:s text:c="13"/>/ <text:s text:c="9"/>\</text:span><text:span text:style-name="T153"/></text:p>
      <text:p text:style-name="P32" loext:marker-style-name="T153"><text:soft-page-break/><text:span text:style-name="T153"><text:s text:c="8"/>[</text:span><text:span text:style-name="T178">20</text:span><text:span text:style-name="T153">, </text:span><text:span text:style-name="T192">80</text:span><text:span text:style-name="T153">] <text:s text:c="5"/>[</text:span><text:span text:style-name="T178">30</text:span><text:span text:style-name="T153">, </text:span><text:span text:style-name="T192">90</text:span><text:span text:style-name="T153">]</text:span></text:p>
      <text:p text:style-name="P33"/>
      <text:p text:style-name="P28" loext:marker-style-name="T151"><text:span text:style-name="T152">拆開來看左右兩個 </text:span><text:span text:style-name="T151">Heap</text:span><text:span text:style-name="T152">：</text:span></text:p>
      <text:p text:style-name="P29" loext:marker-style-name="T153"><text:span text:style-name="T153"><text:s text:c="2"/></text:span><text:span text:style-name="T193">左值（min 端）形成 Min Heap</text:span><text:span text:style-name="T153">： <text:s text:c="2"/></text:span><text:span text:style-name="T194">右值（max 端）形成 Max Heap</text:span><text:span text:style-name="T153">：</text:span></text:p>
      <text:p text:style-name="P31"/>
      <text:p text:style-name="P31" loext:marker-style-name="T153"><text:span text:style-name="T153"><text:s text:c="10"/>10 <text:s text:c="30"/>100</text:span><text:span text:style-name="T153"/></text:p>
      <text:p text:style-name="P31" loext:marker-style-name="T153"><text:span text:style-name="T153"><text:s text:c="9"/>/ <text:s/>\ <text:s text:c="28"/>/ <text:s text:c="3"/>\</text:span><text:span text:style-name="T153"/></text:p>
      <text:p text:style-name="P31" loext:marker-style-name="T153"><text:span text:style-name="T153"><text:s text:c="8"/>20 <text:s/>30 <text:s text:c="26"/>80 <text:s text:c="4"/>90</text:span><text:span text:style-name="T153"/></text:p>
      <text:p text:style-name="P31"/>
      <text:p text:style-name="P32" loext:marker-style-name="T153"><text:span text:style-name="T153"><text:s text:c="2"/>驗證 Min Heap：10 ≤ 20 ✓ <text:s/>10 ≤ 30 ✓ <text:s text:c="2"/>驗證 Max Heap：100 ≥ 80 ✓ <text:s/>100 ≥ 90 ✓</text:span><text:span text:style-name="T153"/></text:p>
      <text:p text:style-name="P33"/>
      <text:p text:style-name="P28" loext:marker-style-name="T151"><text:span text:style-name="T152">因此：</text:span><text:span text:style-name="T151"/></text:p>
      <text:list text:continue-numbering="true" text:style-name="WWNum14">
        <text:list-item>
          <text:p text:style-name="P34" loext:marker-style-name="T151"><text:span text:style-name="T184">Root </text:span><text:span text:style-name="T165">的</text:span><text:span text:style-name="T183">左</text:span><text:span text:style-name="T165">值</text:span><text:span text:style-name="T152"> </text:span><text:span text:style-name="T151">= </text:span><text:span text:style-name="T195">Min</text:span><text:span text:style-name="T151"> Heap </text:span><text:span text:style-name="T152">的 </text:span><text:span text:style-name="T151">Root = </text:span><text:span text:style-name="T196">全域最小值</text:span><text:span text:style-name="T152"> </text:span><text:span text:style-name="T151">= 10 <text:s/>→ <text:s/>Find-Min = O(1)</text:span></text:p>
        </text:list-item>
        <text:list-item>
          <text:p text:style-name="P34" loext:marker-style-name="T151"><text:span text:style-name="T184">Root </text:span><text:span text:style-name="T165">的</text:span><text:span text:style-name="T186">右</text:span><text:span text:style-name="T165">值</text:span><text:span text:style-name="T152"> </text:span><text:span text:style-name="T151">= </text:span><text:span text:style-name="T197">Max</text:span><text:span text:style-name="T151"> Heap </text:span><text:span text:style-name="T152">的 </text:span><text:span text:style-name="T151">Root = </text:span><text:span text:style-name="T198">全域最大值</text:span><text:span text:style-name="T152"> </text:span><text:span text:style-name="T151">= 100 <text:s/>→ <text:s/>Find-Max = O(1)</text:span></text:p>
        </text:list-item>
      </text:list>
      <text:p text:style-name="P33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33" loext:marker-style-name="T161"><text:span text:style-name="T161">🎯 Interval Heap </text:span><text:span text:style-name="T162">的核心價值</text:span></text:p>
            <text:p text:style-name="P33" loext:marker-style-name="T163"><text:span text:style-name="T199">Root </text:span><text:span text:style-name="T200">節點</text:span><text:span text:style-name="T169">同時持有全域最小值（左值）和全域最大值（右值）</text:span><text:span text:style-name="T164">，</text:span></text:p>
            <text:p text:style-name="P35" loext:marker-style-name="T163"><text:span text:style-name="T201">無論取哪一端</text:span><text:span text:style-name="T164">，</text:span><text:span text:style-name="T160">都能 </text:span><text:span text:style-name="T173">O(1) </text:span><text:span text:style-name="T160">找到、</text:span><text:span text:style-name="T173">O(log n) </text:span><text:span text:style-name="T160">取出。</text:span></text:p>
          </table:table-cell>
        </table:table-row>
      </table:table>
      <text:p text:style-name="P36"/>
      <text:h text:style-name="P6" text:outline-level="2" loext:marker-style-name="T13"><text:span text:style-name="T14">7-4.5 <text:s/></text:span><text:span text:style-name="T202">Find 找到 vs. Extract 取出</text:span><text:span text:style-name="T14">：</text:span><text:span text:style-name="T203">為何一個 O(1)、一個 O(log n)</text:span><text:span text:style-name="T14">？</text:span></text:h>
      <text:p text:style-name="P5" loext:marker-style-name="T204"><text:span text:style-name="T205">這是很多人第一次接觸 Heap 時最容易混淆的地方。關鍵在於：</text:span><text:span text:style-name="T206">「找到（Find/Peek）」和「取出（Extract/Delete）」是完全不同的兩件事。</text:span></text:p>
      <text:p text:style-name="P36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9" loext:marker-style-name="T27"><text:span text:style-name="T207">先用普通 Max Heap 建立直覺</text:span><text:span text:style-name="T27"/></text:p>
          </table:table-cell>
        </table:table-row>
        <table:table-row table:style-name="表格30.1">
          <table:table-cell table:style-name="表格30.A1" office:value-type="string">
            <text:p text:style-name="P9"/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11"/>100 <text:s text:c="2"/>← Root = 全域最大值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10"/>/ <text:s text:c="2"/>\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8"/>90 <text:s text:c="3"/>80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5"/>70 <text:s/>60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/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Find-Max（找最大值）= O(1)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2"/>→ 直接讀 Root，什麼都不用動。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/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Extract-Max（取出最大值）= O(log n)</text:span><text:span text:style-name="T22"/></text:p>
          </table:table-cell>
        </table:table-row>
        <text:soft-page-break/>
        <table:table-row table:style-name="表格30.1">
          <table:table-cell table:style-name="表格30.A1" office:value-type="string">
            <text:p text:style-name="P9" loext:marker-style-name="T22"><text:span text:style-name="T23"><text:s text:c="2"/>→ </text:span><text:span text:style-name="T60">要真正把 100 從樹裡刪掉，並維持兩個條件：</text:span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4"/>1. </text:span><text:span text:style-name="T208">Complete Binary Tree 結構不能破壞</text:span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4"/>2. </text:span><text:span text:style-name="T209">Heap Property（父 ≥ 子）不能違反</text:span></text:p>
          </table:table-cell>
        </table:table-row>
      </table:table>
      <text:p text:style-name="P36"/>
      <text:p text:style-name="P5" loext:marker-style-name="T204"><text:span text:style-name="T210">「取出」的代價遠比「找到」高，是因為</text:span><text:span text:style-name="T211">刪除 Root 後必須完整修復整棵樹的結構。</text:span><text:span text:style-name="T205">流程如下：</text:span></text:p>
      <text:p text:style-name="P36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9" loext:marker-style-name="T22"><text:span text:style-name="T23">Extract-Max 完整流程（以上面的 Max Heap 為例）：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1：取出 Root = 10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2：把最後元素（葉節點最右端）60 搬到 Root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9"/>60 <text:s text:c="2"/>← 60 補位後，Heap Property 壞掉了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7"/>90 <text:s/>8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6"/>/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5"/>7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3：60 &lt; 90，違反 Max Heap → 與較大子節點 90 交換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7"/>60 <text:s/>8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6"/>/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5"/>7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4：60 &lt; 70，仍違反 → 再往下交換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7"/>70 <text:s/>80</text:span><text:span text:style-name="T22"/></text:p>
          </table:table-cell>
        </table:table-row>
        <text:soft-page-break/>
        <table:table-row table:style-name="表格31.1">
          <table:table-cell table:style-name="表格31.A1" office:value-type="string">
            <text:p text:style-name="P9" loext:marker-style-name="T22"><text:span text:style-name="T23"><text:s text:c="6"/>/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5"/>60 <text:s text:c="2"/>← 60 最終落到葉節點，停止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這個「一路往下修正」的過程稱為 Heapify Down（向下沉）。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37">最壞情況需走完整棵樹的高度 h = log₂n</text:span><text:span text:style-name="T23">，因此 </text:span><text:span text:style-name="T81">O(log n)</text:span><text:span text:style-name="T23">。</text:span></text:p>
          </table:table-cell>
        </table:table-row>
      </table:table>
      <text:p text:style-name="P3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9" loext:marker-style-name="T27"><text:span text:style-name="T207">直覺比喻：</text:span><text:span text:style-name="T27"/></text:p>
          </table:table-cell>
        </table:table-row>
        <table:table-row table:style-name="表格32.1">
          <table:table-cell table:style-name="表格32.A1" office:value-type="string">
            <text:p text:style-name="P9"/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2"/>Find <text:s text:c="2"/>= 看書架最上面那本書 → O(1)，就在眼前，看一眼即可。</text:span><text:span text:style-name="T22"/></text:p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2"/></text:span><text:span text:style-name="T26">Extract</text:span><text:span text:style-name="T23"> = </text:span><text:span text:style-name="T212">把那本書抽出來 → O(log n)</text:span></text:p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11"/></text:span><text:span text:style-name="T60"><text:s/>抽走後，下面的書要重新整理排好，</text:span></text:p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12"/></text:span><text:span text:style-name="T38">這個「整理」的工作量才是 O(log n) 的真正來源。</text:span></text:p>
          </table:table-cell>
        </table:table-row>
      </table:table>
      <text:p text:style-name="P36"/>
      <text:h text:style-name="P6" text:outline-level="2" loext:marker-style-name="T13"><text:span text:style-name="T14">7-4.6 <text:s/>Interval Heap 的 Extract-Min 與 Extract-Max 完整示範</text:span><text:span text:style-name="T13"/></text:h>
      <text:p text:style-name="P5" loext:marker-style-name="T204"><text:span text:style-name="T205">Interval Heap 的 Extract 操作，本質上就是普通 Heap 的 Heapify Down，只是同時維護 Min 端和 Max 端兩條性質。以下用同一棵初始樹，分別展示兩種操作。</text:span><text:span text:style-name="T204"/></text:p>
      <text:p text:style-name="P36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9" loext:marker-style-name="T27"><text:span text:style-name="T207">初始 Interval Heap：</text:span><text:span text:style-name="T27"/>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<text:s text:c="13"/>[10, 100] <text:s text:c="6"/>← Root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<text:s text:c="12"/>/ <text:s text:c="9"/>\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<text:s text:c="7"/>[20, 80] <text:s text:c="5"/>[30, 90]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左值（min 端）形成 Min Heap： <text:s/>10 ≤ 20，10 ≤ 30 ✓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右值（max 端）形成 Max Heap： <text:s/>100 ≥ 80，100 ≥ 90 ✓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全域最小值 = Root 左值 = 10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全域最大值 = Root 右值 = 100</text:span><text:span text:style-name="T22"/></text:p>
          </table:table-cell>
        </table:table-row>
      </table:table>
      <text:p text:style-name="P36"/>
      <text:h text:style-name="P6" text:outline-level="2" loext:marker-style-name="T13"><text:span text:style-name="T14"><text:s text:c="2"/>一、Extract-Min（</text:span><text:span text:style-name="T213">取出最小值 10</text:span><text:span text:style-name="T14">）</text:span>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9" loext:marker-style-name="T22"><text:span text:style-name="T23">Step 1：</text:span><text:span text:style-name="T214">取出 Root 左值（最小值）= 10</text:span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9" loext:marker-style-name="T22"><text:span text:style-name="T23"><text:s text:c="8"/>Root 左側空洞，需要補位。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 ?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 <text:s text:c="7"/>\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6"/>[20, 80] <text:s text:c="3"/>[30, 9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Step 2：補位規則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把最後節點（[30, 90]）整體移除，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取其 min 端（30）補到 Root 的左值位置。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（補 min 端修的是 Min Heap；補 max 端修的是 Max Heap）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30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6"/>[20, 8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Step 3：檢查 Min Heap 性質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Root min = 30，Child min = 20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</text:span><text:span text:style-name="T121">30 &gt; 20 → 違反 Min Heap（父 ≤ 子）</text:span><text:span text:style-name="T23">→ </text:span><text:span text:style-name="T93">交換 min 端</text:span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Step 4：Heapify Down（min 端下沉）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20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6"/>[30, 8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20 ≤ 30 → 合法，停止。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最終結果：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20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9" loext:marker-style-name="T22"><text:span text:style-name="T23"><text:s text:c="6"/>[30, 8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成功取出最小值 10，</text:span><text:span text:style-name="T60">Min Heap 與 Max Heap 性質皆完整恢復</text:span><text:span text:style-name="T23">。</text:span></text:p>
          </table:table-cell>
        </table:table-row>
      </table:table>
      <text:p text:style-name="P36"/>
      <text:h text:style-name="P6" text:outline-level="2" loext:marker-style-name="T13"><text:span text:style-name="T14"><text:s text:c="2"/>二、Extract-Max（</text:span><text:span text:style-name="T213">取出最大值 100</text:span><text:span text:style-name="T14">）</text:span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9" loext:marker-style-name="T22"><text:span text:style-name="T23">使用同一棵初始樹：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3"/>[10, 10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2"/>/ <text:s text:c="9"/>\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7"/>[20, 80] <text:s text:c="5"/>[3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Step 1：</text:span><text:span text:style-name="T214">取出 Root 右值（最大值）= 100</text:span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Root 右側空洞，需要補位。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[10, <text:s/>? 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/ <text:s text:c="7"/>\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6"/>[20, 80] <text:s text:c="3"/>[3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Step 2：補位規則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把最後節點（[30, 90]）整體移除，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取其 max 端（90）補到 Root 的右值位置。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[1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6"/>[20, 8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Step 3：檢查 Max Heap 性質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Root max = 90，Child max = 80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90 ≥ 80 → 符合 Max Heap → 無需交換，停止。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ext:soft-page-break/>
        <table:table-row table:style-name="表格35.1">
          <table:table-cell table:style-name="表格35.A1" office:value-type="string">
            <text:p text:style-name="P9" loext:marker-style-name="T22"><text:span text:style-name="T23">最終結果：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[1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6"/>[20, 8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成功取出最大值 100，</text:span><text:span text:style-name="T60">結構完整</text:span><text:span text:style-name="T23">。</text:span></text:p>
          </table:table-cell>
        </table:table-row>
      </table:table>
      <text:p text:style-name="P36"/>
      <text:h text:style-name="P6" text:outline-level="2" loext:marker-style-name="T13"><text:span text:style-name="T14"><text:s text:c="2"/>三、Extract-Max 的下沉範例（需多次 Heapify）</text:span><text:span text:style-name="T13"/></text:h>
      <text:p text:style-name="P5" loext:marker-style-name="T204"><text:span text:style-name="T205">上例的 Max Heap 恰好不需要下沉。以下補充一個「確實需要多次下沉」的案例，更能體現 O(log n) 的代價：</text:span><text:span text:style-name="T204"/></text:p>
      <text:p text:style-name="P36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9" loext:marker-style-name="T22"><text:span text:style-name="T23">初始 Interval Heap（5 個節點）：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10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9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 <text:s text:c="6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85] <text:s/>[5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1：取出 Root max = 100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2：最後節點 [50, 70] 移除，取其 max 端 70 補到 Root。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9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8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3：Root max = 70，子節點 max：左=95，右=90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較大子節點 max = 95 &gt; 70 → 違反 Max Heap → 70 與 95 交換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ext:soft-page-break/>
        <table:table-row table:style-name="表格36.1">
          <table:table-cell table:style-name="表格36.A1" office:value-type="string">
            <text:p text:style-name="P9" loext:marker-style-name="T22"><text:span text:style-name="T23"><text:s text:c="14"/>[10, 9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70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8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4：[20, 70] 的 max = 70，子節點 max：左=85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85 &gt; 70 → 仍違反 → 70 與 85 交換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9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8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5：[40, 70] 已是葉節點 → 停止。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最終結果：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9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8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全域最大值已更新為 95。</text:span><text:span text:style-name="T22"/></text:p>
          </table:table-cell>
        </table:table-row>
      </table:table>
      <text:p text:style-name="P36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9" loext:marker-style-name="T27"><text:span text:style-name="T207">公職考試必記：Find vs. Extract 時間一覽</text:span><text:span text:style-name="T27"/></text:p>
          </table:table-cell>
        </table:table-row>
        <table:table-row table:style-name="表格37.1">
          <table:table-cell table:style-name="表格37.A1" office:value-type="string">
            <text:p text:style-name="P9"/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<text:s text:c="2"/>操作 <text:s text:c="14"/>Interval Heap <text:s text:c="3"/>普通 Max Heap <text:s text:c="3"/>普通 Min Heap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<text:s text:c="2"/>Find-Min（找最小） O(1) <text:s/>★ <text:s text:c="9"/>O(n) <text:s text:c="12"/>O(1)</text:span><text:span text:style-name="T22"/></text:p>
          </table:table-cell>
        </table:table-row>
        <text:soft-page-break/>
        <table:table-row table:style-name="表格37.1">
          <table:table-cell table:style-name="表格37.A1" office:value-type="string">
            <text:p text:style-name="P9" loext:marker-style-name="T22"><text:span text:style-name="T23"><text:s text:c="2"/>Find-Max（找最大） O(1) <text:s/>★ <text:s text:c="9"/>O(1) <text:s text:c="12"/>O(n)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37"><text:span text:style-name="T215"><text:s text:c="2"/>Extract-Min <text:s text:c="7"/>O(log n) <text:s text:c="9"/></text:span><text:span text:style-name="T216">O(n) </text:span><text:span text:style-name="T215"><text:s text:c="12"/>O(log n)</text:span></text:p>
          </table:table-cell>
        </table:table-row>
        <table:table-row table:style-name="表格37.1">
          <table:table-cell table:style-name="表格37.A1" office:value-type="string">
            <text:p text:style-name="P37"><text:span text:style-name="T215"><text:s text:c="2"/>Extract-Max <text:s text:c="7"/>O(log n) <text:s text:c="9"/>O(log n) <text:s text:c="8"/></text:span><text:span text:style-name="T217">O(n)</text:span></text:p>
          </table:table-cell>
        </table:table-row>
        <table:table-row table:style-name="表格37.1">
          <table:table-cell table:style-name="表格37.A1" office:value-type="string">
            <text:p text:style-name="P9"/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38">Interval Heap 的兩個 Extract 都是 O(log n)</text:span><text:span text:style-name="T23">，這是其核心優勢：</text:span></text:p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Find 快是因為答案就在 Root；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18">Extract 要 O(log n) </text:span><text:span text:style-name="T23">是因為</text:span><text:span text:style-name="T81">刪除後必須 Heapify Down 修復結構</text:span><text:span text:style-name="T23">。</text:span></text:p>
          </table:table-cell>
        </table:table-row>
      </table:table>
      <text:p text:style-name="P36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9" loext:marker-style-name="T22"><text:span text:style-name="T23">⚠️ <text:s/>常見混淆整理：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「Root 節點同時持有全域最小與最大值，所以 O(1) 找到。」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→ 正確。Find = 讀一個值，完全不修改樹，當然 O(1)。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「Find 都 O(1) 了，Extract 怎麼還要 O(log n)？」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→ 因為</text:span><text:span text:style-name="T76"> Extract 是「刪除 + 修復整棵樹」，不只是讀值。</text:span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<text:s text:c="2"/>刪除後最後元素補位，再 Heapify Down 重建性質，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<text:s text:c="2"/>最壞走 log n 層 → O(log n)。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記法：Find = 看，不動樹 → O(1)。</text:span><text:span text:style-name="T60">Extract = 拿走，要整理 → O(log n)</text:span><text:span text:style-name="T23">。</text:span></text:p>
          </table:table-cell>
        </table:table-row>
      </table:table>
      <text:p text:style-name="P36"/>
      <text:p text:style-name="P36"/>
      <text:h text:style-name="P27" text:outline-level="2" loext:marker-style-name="T146"><text:span text:style-name="T146">7-5 <text:s/></text:span><text:span text:style-name="T147">操作複雜度一覽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Standard" loext:marker-style-name="T219"><text:span text:style-name="T220">操作</text:span><text:span text:style-name="T219"/></text:p>
          </table:table-cell>
          <table:table-cell table:style-name="表格39.A1" office:value-type="string">
            <text:p text:style-name="Standard" loext:marker-style-name="T219"><text:span text:style-name="T219">Interval Heap</text:span><text:span text:style-name="T219"/></text:p>
          </table:table-cell>
          <table:table-cell table:style-name="表格39.A1" office:value-type="string">
            <text:p text:style-name="Standard" loext:marker-style-name="T219"><text:span text:style-name="T220">普通 </text:span><text:span text:style-name="T219">Max Heap</text:span></text:p>
          </table:table-cell>
          <table:table-cell table:style-name="表格39.A1" office:value-type="string">
            <text:p text:style-name="Standard" loext:marker-style-name="T219"><text:span text:style-name="T220">普通 </text:span><text:span text:style-name="T219">Min Heap</text:span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221"><text:span text:style-name="T221">Find-Min</text:span><text:span text:style-name="T222">（找最小值）</text:span></text:p>
          </table:table-cell>
          <table:table-cell table:style-name="表格39.A2" office:value-type="string">
            <text:p text:style-name="Standard" loext:marker-style-name="T221"><text:span text:style-name="T221">O(1) ★</text:span><text:span text:style-name="T221"/></text:p>
          </table:table-cell>
          <table:table-cell table:style-name="表格39.A2" office:value-type="string">
            <text:p text:style-name="Standard" loext:marker-style-name="T221"><text:span text:style-name="T221">O(n)</text:span><text:span text:style-name="T221"/></text:p>
          </table:table-cell>
          <table:table-cell table:style-name="表格39.A2" office:value-type="string">
            <text:p text:style-name="Standard" loext:marker-style-name="T221"><text:span text:style-name="T221">O(1)</text:span><text:span text:style-name="T221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221"><text:span text:style-name="T221">Find-Max</text:span><text:span text:style-name="T222">（找最大值）</text:span></text:p>
          </table:table-cell>
          <table:table-cell table:style-name="表格39.A3" office:value-type="string">
            <text:p text:style-name="Standard" loext:marker-style-name="T221"><text:span text:style-name="T221">O(1) ★</text:span><text:span text:style-name="T221"/></text:p>
          </table:table-cell>
          <table:table-cell table:style-name="表格39.A3" office:value-type="string">
            <text:p text:style-name="Standard" loext:marker-style-name="T221"><text:span text:style-name="T221">O(1)</text:span><text:span text:style-name="T221"/></text:p>
          </table:table-cell>
          <table:table-cell table:style-name="表格39.A3" office:value-type="string">
            <text:p text:style-name="Standard" loext:marker-style-name="T221"><text:span text:style-name="T221">O(n)</text:span><text:span text:style-name="T221"/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221"><text:span text:style-name="T221">Extract-Min</text:span><text:span text:style-name="T222">（取出最小）</text:span></text:p>
          </table:table-cell>
          <table:table-cell table:style-name="表格39.A2" office:value-type="string">
            <text:p text:style-name="Standard" loext:marker-style-name="T221"><text:span text:style-name="T221">O(log n) ★</text:span><text:span text:style-name="T221"/></text:p>
          </table:table-cell>
          <table:table-cell table:style-name="表格39.A2" office:value-type="string">
            <text:p text:style-name="Standard" loext:marker-style-name="T221"><text:span text:style-name="T221">O(n)</text:span><text:span text:style-name="T221"/></text:p>
          </table:table-cell>
          <table:table-cell table:style-name="表格39.A2" office:value-type="string">
            <text:p text:style-name="Standard" loext:marker-style-name="T221"><text:span text:style-name="T221">O(log n)</text:span><text:span text:style-name="T221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221"><text:span text:style-name="T221">Extract-Max</text:span><text:span text:style-name="T222">（取出最大）</text:span></text:p>
          </table:table-cell>
          <table:table-cell table:style-name="表格39.A3" office:value-type="string">
            <text:p text:style-name="Standard" loext:marker-style-name="T221"><text:span text:style-name="T221">O(log n) ★</text:span><text:span text:style-name="T221"/></text:p>
          </table:table-cell>
          <table:table-cell table:style-name="表格39.A3" office:value-type="string">
            <text:p text:style-name="Standard" loext:marker-style-name="T221"><text:span text:style-name="T221">O(log n)</text:span><text:span text:style-name="T221"/></text:p>
          </table:table-cell>
          <table:table-cell table:style-name="表格39.A3" office:value-type="string">
            <text:p text:style-name="Standard" loext:marker-style-name="T221"><text:span text:style-name="T221">O(n)</text:span><text:span text:style-name="T221"/></text:p>
          </table:table-cell>
        </table:table-row>
      </table:table>
      <text:p text:style-name="P28"/>
      <table:table table:name="表格40" table:style-name="表格40">
        <table:table-column table:style-name="表格40.A"/>
        <text:soft-page-break/>
        <table:table-row table:style-name="表格40.1">
          <table:table-cell table:style-name="表格40.A1" office:value-type="string">
            <text:p text:style-name="P33" loext:marker-style-name="T161"><text:span text:style-name="T161">⚠️ <text:s/></text:span><text:span text:style-name="T162">普通 </text:span><text:span text:style-name="T161">Min/Max Heap </text:span><text:span text:style-name="T162">各有盲點：</text:span></text:p>
            <text:p text:style-name="P33" loext:marker-style-name="T163"><text:span text:style-name="T158">普通 </text:span><text:span text:style-name="T159">Max Heap </text:span><text:span text:style-name="T158">找最小值 </text:span><text:span text:style-name="T164">→ </text:span><text:span text:style-name="T184">O(n)</text:span><text:span text:style-name="T165">（要掃整棵樹）</text:span></text:p>
            <text:p text:style-name="P33" loext:marker-style-name="T163"><text:span text:style-name="T223">普通 </text:span><text:span text:style-name="T224">Min Heap </text:span><text:span text:style-name="T223">找最大值 </text:span><text:span text:style-name="T164">→ </text:span><text:span text:style-name="T184">O(n)</text:span><text:span text:style-name="T165">（同理）</text:span></text:p>
            <text:p text:style-name="P35" loext:marker-style-name="T163"><text:span text:style-name="T173">Interval Heap </text:span><text:span text:style-name="T160">解決此問題，兩端操作都達到 </text:span><text:span text:style-name="T173">O(log n)</text:span><text:span text:style-name="T164">，這是其最大優勢。</text:span></text:p>
          </table:table-cell>
        </table:table-row>
      </table:table>
      <text:p text:style-name="P36"/>
      <text:h text:style-name="P27" text:outline-level="2" loext:marker-style-name="T146"><text:span text:style-name="T146">7-6 <text:s/>Insert </text:span><text:span text:style-name="T147">操作示範（插入 </text:span><text:span text:style-name="T146">5</text:span><text:span text:style-name="T147">）</text:span></text:h>
      <text:p text:style-name="P28" loext:marker-style-name="T151"><text:span text:style-name="T152">以下示範將數字 </text:span><text:span text:style-name="T151">5 </text:span><text:span text:style-name="T152">插入含 </text:span><text:span text:style-name="T151">{10, 100}, {20, 80}, {30, 90} </text:span><text:span text:style-name="T152">的 </text:span><text:span text:style-name="T151">Interval Heap</text:span><text:span text:style-name="T152">：</text:span></text:p>
      <text:p text:style-name="P29" loext:marker-style-name="T153"><text:span text:style-name="T153">初始： <text:s text:c="10"/>[10, 100]</text:span><text:span text:style-name="T153"/></text:p>
      <text:p text:style-name="P31" loext:marker-style-name="T153"><text:span text:style-name="T153"><text:s text:c="18"/>/ <text:s text:c="7"/>\</text:span><text:span text:style-name="T153"/></text:p>
      <text:p text:style-name="P31" loext:marker-style-name="T153"><text:span text:style-name="T153"><text:s text:c="13"/>[20, 80] <text:s text:c="2"/>[30, 90]</text:span><text:span text:style-name="T153"/></text:p>
      <text:p text:style-name="P31"/>
      <text:p text:style-name="P31" loext:marker-style-name="T153"><text:span text:style-name="T153">Step 1：</text:span><text:span text:style-name="T154">新葉 [5, 5] </text:span><text:span text:style-name="T153">接在 [20, 80] 左子位置</text:span></text:p>
      <text:p text:style-name="P31" loext:marker-style-name="T153"><text:span text:style-name="T153"><text:s text:c="13"/>[10, 100]</text:span><text:span text:style-name="T153"/></text:p>
      <text:p text:style-name="P31" loext:marker-style-name="T153"><text:span text:style-name="T153"><text:s text:c="14"/>/ <text:s text:c="7"/>\</text:span><text:span text:style-name="T153"/></text:p>
      <text:p text:style-name="P31" loext:marker-style-name="T153"><text:span text:style-name="T153"><text:s text:c="9"/>[20, 80] <text:s text:c="2"/>[30, 90]</text:span><text:span text:style-name="T153"/></text:p>
      <text:p text:style-name="P31" loext:marker-style-name="T153"><text:span text:style-name="T153"><text:s text:c="14"/>/</text:span><text:span text:style-name="T153"/></text:p>
      <text:p text:style-name="P31" loext:marker-style-name="T153"><text:span text:style-name="T153"><text:s text:c="11"/>[5, 5] <text:s text:c="2"/>← </text:span><text:span text:style-name="T225">5 &lt; parent.min(20)</text:span><text:span text:style-name="T153">，</text:span><text:span text:style-name="T226">min 端需上浮</text:span></text:p>
      <text:p text:style-name="P31"/>
      <text:p text:style-name="P31" loext:marker-style-name="T153"><text:span text:style-name="T153">Step 2：</text:span><text:span text:style-name="T192">交換 min 端 → [20,80]→[5,80]</text:span><text:span text:style-name="T153">，</text:span><text:span text:style-name="T226">葉→[20,20]</text:span></text:p>
      <text:p text:style-name="P31" loext:marker-style-name="T153"><text:span text:style-name="T153"><text:s text:c="13"/>[10, 100]</text:span><text:span text:style-name="T153"/></text:p>
      <text:p text:style-name="P31" loext:marker-style-name="T153"><text:span text:style-name="T153"><text:s text:c="14"/>/ <text:s text:c="7"/>\</text:span><text:span text:style-name="T153"/></text:p>
      <text:p text:style-name="P31" loext:marker-style-name="T153"><text:span text:style-name="T153"><text:s text:c="10"/>[5, 80] <text:s text:c="2"/>[30, 90] <text:s text:c="2"/>← </text:span><text:span text:style-name="T225">5 &lt; Root.min(10)</text:span><text:span text:style-name="T153">，</text:span><text:span text:style-name="T226">繼續上浮</text:span></text:p>
      <text:p text:style-name="P31" loext:marker-style-name="T153"><text:span text:style-name="T153"><text:s text:c="14"/>/</text:span><text:span text:style-name="T153"/></text:p>
      <text:p text:style-name="P31" loext:marker-style-name="T153"><text:span text:style-name="T153"><text:s text:c="10"/>[20, 20]</text:span><text:span text:style-name="T153"/></text:p>
      <text:p text:style-name="P31"/>
      <text:p text:style-name="P31" loext:marker-style-name="T153"><text:span text:style-name="T153">Step 3：</text:span><text:span text:style-name="T192">交換 min 端 → Root[10,100]→[5,100]</text:span><text:span text:style-name="T153">，</text:span><text:span text:style-name="T226">[5,80]→[10,80]</text:span></text:p>
      <text:p text:style-name="P31"/>
      <text:p text:style-name="P31" loext:marker-style-name="T153"><text:span text:style-name="T153">最終： <text:s text:c="10"/>[5, 100] <text:s text:c="2"/>← </text:span><text:span text:style-name="T227">全域最小值已更新</text:span></text:p>
      <text:p text:style-name="P31" loext:marker-style-name="T153"><text:span text:style-name="T153"><text:s text:c="18"/>/ <text:s text:c="7"/>\</text:span><text:span text:style-name="T153"/></text:p>
      <text:p text:style-name="P31" loext:marker-style-name="T153"><text:span text:style-name="T153"><text:s text:c="13"/>[10, 80] <text:s text:c="2"/>[30, 90]</text:span><text:span text:style-name="T153"/></text:p>
      <text:p text:style-name="P31" loext:marker-style-name="T153"><text:span text:style-name="T153"><text:s text:c="18"/>/</text:span><text:span text:style-name="T153"/></text:p>
      <text:p text:style-name="P32" loext:marker-style-name="T153"><text:span text:style-name="T153"><text:s text:c="13"/>[20, 20]</text:span><text:span text:style-name="T153"/></text:p>
      <text:p text:style-name="P33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33" loext:marker-style-name="T161"><text:span text:style-name="T161">Insert </text:span><text:span text:style-name="T162">規則：</text:span></text:p>
            <text:p text:style-name="P33" loext:marker-style-name="T163"><text:span text:style-name="T164">新值 </text:span><text:span text:style-name="T163">&lt; </text:span><text:span text:style-name="T164">父節點左值（</text:span><text:span text:style-name="T163">min</text:span><text:span text:style-name="T164">）→ 交換左值，繼續往上（</text:span><text:span text:style-name="T163">min </text:span><text:span text:style-name="T164">端上浮）</text:span></text:p>
            <text:p text:style-name="P33" loext:marker-style-name="T163"><text:span text:style-name="T164">新值 </text:span><text:span text:style-name="T163">&gt; </text:span><text:span text:style-name="T164">父節點右值（</text:span><text:span text:style-name="T163">max</text:span><text:span text:style-name="T164">）→ 交換右值，繼續往上（</text:span><text:span text:style-name="T163">max </text:span><text:span text:style-name="T164">端上浮）</text:span></text:p>
            <text:p text:style-name="P35" loext:marker-style-name="T163"><text:span text:style-name="T164">新值介於父節點 </text:span><text:span text:style-name="T163">[min, max] </text:span><text:span text:style-name="T164">之間 → 合法，停止</text:span></text:p>
          </table:table-cell>
        </table:table-row>
      </table:table>
      <text:h text:style-name="P26" text:outline-level="1"><text:span text:style-name="T145">八、合併兩個 </text:span><text:span text:style-name="T144">Heap</text:span><text:span text:style-name="T145">（</text:span><text:span text:style-name="T144">Merge Heap</text:span><text:span text:style-name="T145">）【</text:span><text:span text:style-name="T144">111</text:span><text:span text:style-name="T145">地</text:span><text:span text:style-name="T144">Q4</text:span><text:span text:style-name="T145">】</text:span></text:h>
      <text:h text:style-name="P27" text:outline-level="2" loext:marker-style-name="T146"><text:span text:style-name="T146">8-1 <text:s/></text:span><text:span text:style-name="T147">問題起源：普通 </text:span><text:span text:style-name="T146">Heap </text:span><text:span text:style-name="T147">合併需要 </text:span><text:span text:style-name="T146">O(n+m)</text:span></text:h>
      <text:p text:style-name="P28" loext:marker-style-name="T151"><text:span text:style-name="T152">假設現在有兩個 </text:span><text:span text:style-name="T151">Max Heap A </text:span><text:span text:style-name="T152">和 </text:span><text:span text:style-name="T151">B</text:span><text:span text:style-name="T152">，你想把它們合併成一個新的 </text:span><text:span text:style-name="T151">Max Heap</text:span><text:span text:style-name="T152">：</text:span></text:p>
      <text:p text:style-name="P29" loext:marker-style-name="T153"><text:soft-page-break/><text:span text:style-name="T153"><text:s text:c="2"/>Heap A： <text:s text:c="9"/>Heap B： <text:s text:c="9"/>合併目標：</text:span><text:span text:style-name="T153"/></text:p>
      <text:p text:style-name="P31" loext:marker-style-name="T153"><text:span text:style-name="T153"><text:s text:c="7"/>90 <text:s text:c="15"/>95 <text:s text:c="16"/>95</text:span><text:span text:style-name="T153"/></text:p>
      <text:p text:style-name="P31" loext:marker-style-name="T153"><text:span text:style-name="T153"><text:s text:c="6"/>/ <text:s/>\ <text:s text:c="13"/>/ <text:s/>\ <text:s text:c="14"/>/ <text:s text:c="3"/>\</text:span><text:span text:style-name="T153"/></text:p>
      <text:p text:style-name="P31" loext:marker-style-name="T153"><text:span text:style-name="T153"><text:s text:c="5"/>70 <text:s text:c="2"/>80 <text:s text:c="10"/>60 <text:s text:c="2"/>50 <text:s text:c="10"/>90 <text:s text:c="5"/>80</text:span><text:span text:style-name="T153"/></text:p>
      <text:p text:style-name="P31" loext:marker-style-name="T153"><text:span text:style-name="T153"><text:s text:c="40"/>/ <text:s/>\ <text:s text:c="2"/>/</text:span><text:span text:style-name="T153"/></text:p>
      <text:p text:style-name="P32" loext:marker-style-name="T153"><text:span text:style-name="T153"><text:s text:c="39"/>70 <text:s/>60 50</text:span><text:span text:style-name="T153"/></text:p>
      <text:p text:style-name="P33"/>
      <text:p text:style-name="P28" loext:marker-style-name="T151"><text:span text:style-name="T152">普通 </text:span><text:span text:style-name="T151">Binary Heap </text:span><text:span text:style-name="T152">沒有高效的合併方法，通常只能：</text:span></text:p>
      <text:list text:continue-numbering="true" text:style-name="WWNum14">
        <text:list-item>
          <text:p text:style-name="P34" loext:marker-style-name="T151"><text:span text:style-name="T152">方法：把 </text:span><text:span text:style-name="T151">A </text:span><text:span text:style-name="T152">和 </text:span><text:span text:style-name="T151">B </text:span><text:span text:style-name="T152">的所有元素倒出來，重新執行 </text:span><text:span text:style-name="T151">Bottom-Up Build Heap</text:span><text:span text:style-name="T152">。</text:span></text:p>
        </text:list-item>
        <text:list-item>
          <text:p text:style-name="P34" loext:marker-style-name="T151"><text:span text:style-name="T152">代價：</text:span><text:span text:style-name="T151">O(n+m)</text:span><text:span text:style-name="T152">，</text:span><text:span text:style-name="T151">n </text:span><text:span text:style-name="T152">和 </text:span><text:span text:style-name="T151">m </text:span><text:span text:style-name="T152">是兩個 </text:span><text:span text:style-name="T151">Heap </text:span><text:span text:style-name="T152">的大小。</text:span></text:p>
        </text:list-item>
      </text:list>
      <text:p text:style-name="P33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33" loext:marker-style-name="T161"><text:span text:style-name="T161">❓ O(n+m) </text:span><text:span text:style-name="T162">有什麼問題？</text:span></text:p>
            <text:p text:style-name="P33" loext:marker-style-name="T163"><text:span text:style-name="T164">對單次合併來說 </text:span><text:span text:style-name="T163">O(n+m) </text:span><text:span text:style-name="T164">尚可接受，但有些系統一天要合併幾十萬次：</text:span></text:p>
            <text:p text:style-name="P33" loext:marker-style-name="T163"><text:span text:style-name="T163"><text:s text:c="2"/>• Event-driven Simulation</text:span><text:span text:style-name="T164">（事件驅動模擬）</text:span></text:p>
            <text:p text:style-name="P33" loext:marker-style-name="T163"><text:span text:style-name="T163"><text:s text:c="2"/>• </text:span><text:span text:style-name="T164">作業系統排程器（</text:span><text:span text:style-name="T163">Scheduler</text:span><text:span text:style-name="T164">）</text:span></text:p>
            <text:p text:style-name="P35" loext:marker-style-name="T163"><text:span text:style-name="T163"><text:s text:c="2"/>• </text:span><text:span text:style-name="T164">分散式工作佇列（</text:span><text:span text:style-name="T163">Distributed Job Queue</text:span><text:span text:style-name="T164">）</text:span></text:p>
          </table:table-cell>
        </table:table-row>
      </table:table>
      <text:p text:style-name="P36"/>
      <text:h text:style-name="P27" text:outline-level="2" loext:marker-style-name="T146"><text:span text:style-name="T146">8-2 <text:s/></text:span><text:span text:style-name="T147">解決方案：把右側路徑弄得很短</text:span></text:h>
      <text:p text:style-name="P28" loext:marker-style-name="T151"><text:span text:style-name="T152">發明者的想法很直接：</text:span><text:span text:style-name="T151"/>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33" loext:marker-style-name="T161"><text:span text:style-name="T161">Merge </text:span><text:span text:style-name="T162">只沿右側路徑（</text:span><text:span text:style-name="T161">right path</text:span><text:span text:style-name="T162">）遞迴進行。</text:span></text:p>
            <text:p text:style-name="P33" loext:marker-style-name="T163"><text:span text:style-name="T164">如果右側路徑很短 → </text:span><text:span text:style-name="T163">Merge </text:span><text:span text:style-name="T164">就很快。</text:span></text:p>
            <text:p text:style-name="P35" loext:marker-style-name="T163"><text:span text:style-name="T164">因此：故意把樹弄歪，讓右側路徑保持極短。</text:span><text:span text:style-name="T163"/></text:p>
          </table:table-cell>
        </table:table-row>
      </table:table>
      <text:p text:style-name="P33"/>
      <text:p text:style-name="P29" loext:marker-style-name="T153"><text:span text:style-name="T153"><text:s text:c="2"/>普通 Heap（平衡）： <text:s text:c="11"/>Leftist Heap（故意偏左）：</text:span><text:span text:style-name="T153"/></text:p>
      <text:p text:style-name="P31" loext:marker-style-name="T153"><text:span text:style-name="T153"><text:s text:c="8"/>90 <text:s text:c="29"/>90</text:span><text:span text:style-name="T153"/></text:p>
      <text:p text:style-name="P31" loext:marker-style-name="T153"><text:span text:style-name="T153"><text:s text:c="7"/>/ <text:s/>\ <text:s text:c="27"/>/</text:span><text:span text:style-name="T153"/></text:p>
      <text:p text:style-name="P31" loext:marker-style-name="T153"><text:span text:style-name="T153"><text:s text:c="6"/>80 <text:s text:c="2"/>70 <text:s text:c="24"/>80</text:span><text:span text:style-name="T153"/></text:p>
      <text:p text:style-name="P31" loext:marker-style-name="T153"><text:span text:style-name="T153"><text:s text:c="5"/>/ \ / \ <text:s text:c="24"/>/</text:span><text:span text:style-name="T153"/></text:p>
      <text:p text:style-name="P31" loext:marker-style-name="T153"><text:span text:style-name="T153"><text:s text:c="4"/>60 50 40 30 <text:s text:c="21"/>70</text:span><text:span text:style-name="T153"/></text:p>
      <text:p text:style-name="P31" loext:marker-style-name="T153"><text:span text:style-name="T153"><text:s text:c="36"/>/</text:span><text:span text:style-name="T153"/></text:p>
      <text:p text:style-name="P31" loext:marker-style-name="T153"><text:span text:style-name="T153"><text:s text:c="35"/>60</text:span><text:span text:style-name="T153"/></text:p>
      <text:p text:style-name="P31"/>
      <text:p text:style-name="P32" loext:marker-style-name="T153"><text:span text:style-name="T153"><text:s text:c="2"/>左右差不多，Merge 要走很深 <text:s text:c="5"/>右側路徑只有 1 步！Merge 超快</text:span><text:span text:style-name="T153"/></text:p>
      <text:p text:style-name="P36"/>
      <text:h text:style-name="P27" text:outline-level="2"><text:span text:style-name="T146">8-3 <text:s/>NPL</text:span><text:span text:style-name="T147">（</text:span><text:span text:style-name="T146">Null Path Length</text:span><text:span text:style-name="T147">，空路徑長度）</text:span></text:h>
      <text:p text:style-name="P28" loext:marker-style-name="T151"><text:span text:style-name="T151">NPL </text:span><text:span text:style-name="T152">是「量化右側有多短」的工具。直觀理解：</text:span>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33" loext:marker-style-name="T161"><text:span text:style-name="T161">NPL(node) = </text:span><text:span text:style-name="T162">從該節點出發，走到最近的空節點（</text:span><text:span text:style-name="T161">null</text:span><text:span text:style-name="T162">）所需的步數</text:span></text:p>
            <text:p text:style-name="P35" loext:marker-style-name="T163"><text:span text:style-name="T163">NPL(null) = -1 <text:s/></text:span><text:span text:style-name="T164">（空節點本身的定義）</text:span></text:p>
          </table:table-cell>
        </table:table-row>
      </table:table>
      <text:p text:style-name="P33"><text:soft-page-break/></text:p>
      <text:p text:style-name="P28" loext:marker-style-name="T151"><text:span text:style-name="T152">公式：</text:span><text:span text:style-name="T151">NPL(node) = 1 + min( NPL(</text:span><text:span text:style-name="T152">左子</text:span><text:span text:style-name="T151">), NPL(</text:span><text:span text:style-name="T152">右子</text:span><text:span text:style-name="T151">) )</text:span></text:p>
      <text:p text:style-name="P33"/>
      <text:p text:style-name="P38" loext:marker-style-name="T228"><text:span text:style-name="T228">NPL </text:span><text:span text:style-name="T229">計算範例</text:span></text:p>
      <text:p text:style-name="P29" loext:marker-style-name="T153"><text:span text:style-name="T153"><text:s text:c="14"/>3 <text:s text:c="11"/>← 算 NPL</text:span><text:span text:style-name="T153"/></text:p>
      <text:p text:style-name="P31" loext:marker-style-name="T153"><text:span text:style-name="T153"><text:s text:c="13"/>/ \</text:span><text:span text:style-name="T153"/></text:p>
      <text:p text:style-name="P31" loext:marker-style-name="T153"><text:span text:style-name="T153"><text:s text:c="12"/>5 <text:s text:c="2"/>8</text:span><text:span text:style-name="T153"/></text:p>
      <text:p text:style-name="P31" loext:marker-style-name="T153"><text:span text:style-name="T153"><text:s text:c="11"/>/ \</text:span><text:span text:style-name="T153"/></text:p>
      <text:p text:style-name="P31" loext:marker-style-name="T153"><text:span text:style-name="T153"><text:s text:c="10"/>9 <text:s text:c="2"/>7</text:span><text:span text:style-name="T153"/></text:p>
      <text:p text:style-name="P31"/>
      <text:p text:style-name="P31" loext:marker-style-name="T153"><text:span text:style-name="T153"><text:s text:c="2"/>計算（由葉往根）：</text:span><text:span text:style-name="T153"/></text:p>
      <text:p text:style-name="P31" loext:marker-style-name="T153"><text:span text:style-name="T153"><text:s text:c="4"/>NPL(9) = 1 + min(-1,-1) = 0 <text:s text:c="2"/>（葉節點，兩側皆空）</text:span><text:span text:style-name="T153"/></text:p>
      <text:p text:style-name="P31" loext:marker-style-name="T153"><text:span text:style-name="T153"><text:s text:c="4"/>NPL(7) = 0 <text:s text:c="20"/>（同上）</text:span><text:span text:style-name="T153"/></text:p>
      <text:p text:style-name="P31" loext:marker-style-name="T153"><text:span text:style-name="T153"><text:s text:c="4"/>NPL(8) = 0 <text:s text:c="20"/>（葉節點）</text:span><text:span text:style-name="T153"/></text:p>
      <text:p text:style-name="P31" loext:marker-style-name="T153"><text:span text:style-name="T153"><text:s text:c="4"/>NPL(5) = 1 + min(NPL(9),NPL(7)) = 1+min(0,0) = 1</text:span><text:span text:style-name="T153"/></text:p>
      <text:p text:style-name="P32" loext:marker-style-name="T153"><text:span text:style-name="T153"><text:s text:c="4"/>NPL(3) = 1 + min(NPL(5),NPL(8)) = 1+min(1,0) = 1</text:span><text:span text:style-name="T153"/></text:p>
      <text:p text:style-name="P36"/>
      <text:h text:style-name="P27" text:outline-level="2" loext:marker-style-name="T146"><text:span text:style-name="T146">8-4 <text:s/></text:span><text:span text:style-name="T147">左偏性質（</text:span><text:span text:style-name="T146">Leftist Property</text:span><text:span text:style-name="T147">）</text:span></text:h>
      <text:p text:style-name="P28" loext:marker-style-name="T151"><text:span text:style-name="T151">Leftist Heap </text:span><text:span text:style-name="T152">對每個節點加一條規定：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33" loext:marker-style-name="T161"><text:span text:style-name="T162">每個節點：</text:span><text:span text:style-name="T161">NPL</text:span><text:span text:style-name="T162">（左子樹）≥ </text:span><text:span text:style-name="T161">NPL</text:span><text:span text:style-name="T162">（右子樹）</text:span></text:p>
            <text:p text:style-name="P35" loext:marker-style-name="T163"><text:span text:style-name="T164">意思：左邊一定比右邊「深」或「一樣深」→ 右側路徑一定是最短路徑。</text:span><text:span text:style-name="T163"/></text:p>
          </table:table-cell>
        </table:table-row>
      </table:table>
      <text:p text:style-name="P33"/>
      <text:p text:style-name="P28" loext:marker-style-name="T151"><text:span text:style-name="T152">這個規定保證了：</text:span><text:span text:style-name="T151"/></text:p>
      <text:list text:continue-numbering="true" text:style-name="WWNum14">
        <text:list-item>
          <text:p text:style-name="P34" loext:marker-style-name="T151"><text:span text:style-name="T152">右側路徑長度 ≤ </text:span><text:span text:style-name="T151">log(n+1) <text:s/></text:span><text:span text:style-name="T152">（即使整棵樹有 </text:span><text:span text:style-name="T151">n </text:span><text:span text:style-name="T152">個節點，右路徑也不超過 </text:span><text:span text:style-name="T151">log n </text:span><text:span text:style-name="T152">步）</text:span></text:p>
        </text:list-item>
        <text:list-item>
          <text:p text:style-name="P34" loext:marker-style-name="T151"><text:span text:style-name="T151">Merge </text:span><text:span text:style-name="T152">沿右路徑進行 → 深度 ≤ </text:span><text:span text:style-name="T151">log n → </text:span><text:span text:style-name="T152">時間 </text:span><text:span text:style-name="T151">O(log n)</text:span></text:p>
        </text:list-item>
      </text:list>
      <text:p text:style-name="P33"/>
      <text:p text:style-name="P38" loext:marker-style-name="T228"><text:span text:style-name="T229">上面範例的左偏驗證</text:span><text:span text:style-name="T228"/></text:p>
      <text:p text:style-name="P29" loext:marker-style-name="T153"><text:span text:style-name="T153"><text:s text:c="2"/>節點 3：NPL(左=5) = 1 <text:s/>≥ <text:s/>NPL(右=8) = 0 <text:s text:c="2"/>✓ 左偏</text:span><text:span text:style-name="T153"/></text:p>
      <text:p text:style-name="P31" loext:marker-style-name="T153"><text:span text:style-name="T153"><text:s text:c="2"/>節點 5：NPL(左=9) = 0 <text:s/>≥ <text:s/>NPL(右=7) = 0 <text:s text:c="2"/>✓ 左偏（相等也算）</text:span><text:span text:style-name="T153"/></text:p>
      <text:p text:style-name="P31"/>
      <text:p text:style-name="P32" loext:marker-style-name="T153"><text:span text:style-name="T153">→ 此樹是合法的 Min Leftist Heap ✓</text:span><text:span text:style-name="T153"/></text:p>
      <text:p text:style-name="P36"/>
      <text:h text:style-name="P27" text:outline-level="2"><text:span text:style-name="T146">8-5 <text:s/>Merge </text:span><text:span text:style-name="T147">演算法（以 </text:span><text:span text:style-name="T146">Min Leftist Heap </text:span><text:span text:style-name="T147">為例）</text:span></text:h>
      <text:p text:style-name="P28" loext:marker-style-name="T151"><text:span text:style-name="T152">只有四個步驟，每次都沿右側路徑遞迴：</text:span><text:span text:style-name="T151"/></text:p>
      <text:p text:style-name="P29" loext:marker-style-name="T153"><text:span text:style-name="T153"><text:s text:c="2"/>Step 1：比較 A 和 B 的 Root</text:span><text:span text:style-name="T153"/></text:p>
      <text:p text:style-name="P31" loext:marker-style-name="T153"><text:span text:style-name="T153"><text:s text:c="11"/>→ 較小的 Root 成為新 Root（Min Heap）</text:span><text:span text:style-name="T153"/></text:p>
      <text:p text:style-name="P31" loext:marker-style-name="T153"><text:span text:style-name="T153"><text:s text:c="11"/>→ 較大的 Root 成為另一個子樹（稱為 b）</text:span><text:span text:style-name="T153"/></text:p>
      <text:p text:style-name="P31"/>
      <text:p text:style-name="P31" loext:marker-style-name="T153"><text:span text:style-name="T153"><text:s text:c="2"/>Step 2：遞迴合併「新 Root 的右子樹」與「b」</text:span><text:span text:style-name="T153"/></text:p>
      <text:p text:style-name="P31" loext:marker-style-name="T153"><text:span text:style-name="T153"><text:s text:c="11"/>→ Merge(newRoot.right, b)</text:span><text:span text:style-name="T153"/></text:p>
      <text:p text:style-name="P31"/>
      <text:p text:style-name="P31" loext:marker-style-name="T153"><text:soft-page-break/><text:span text:style-name="T153"><text:s text:c="2"/>Step 3：合併完後，若 NPL(右子樹) &gt; NPL(左子樹)</text:span><text:span text:style-name="T153"/></text:p>
      <text:p text:style-name="P31" loext:marker-style-name="T153"><text:span text:style-name="T153"><text:s text:c="11"/>→ 交換左右子樹，恢復左偏性質</text:span><text:span text:style-name="T153"/></text:p>
      <text:p text:style-name="P31"/>
      <text:p text:style-name="P32" loext:marker-style-name="T153"><text:span text:style-name="T153"><text:s text:c="2"/>Step 4：更新 NPL 值</text:span><text:span text:style-name="T153"/></text:p>
      <text:p text:style-name="P33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33" loext:marker-style-name="T161"><text:span text:style-name="T162">為什麼只走右側路徑？</text:span><text:span text:style-name="T161"/></text:p>
            <text:p text:style-name="P33" loext:marker-style-name="T163"><text:span text:style-name="T163">Merge </text:span><text:span text:style-name="T164">每次遞迴都只取「右子樹」→ 路徑深度 </text:span><text:span text:style-name="T163">= </text:span><text:span text:style-name="T164">右側路徑長度 ≤ </text:span><text:span text:style-name="T163">log n</text:span><text:span text:style-name="T164">。</text:span></text:p>
            <text:p text:style-name="P35" loext:marker-style-name="T163"><text:span text:style-name="T164">左側路徑完全不碰，保持不變。</text:span><text:span text:style-name="T163"/></text:p>
          </table:table-cell>
        </table:table-row>
      </table:table>
      <text:p text:style-name="P36"/>
      <text:h text:style-name="P27" text:outline-level="2" loext:marker-style-name="T146"><text:span text:style-name="T146">8-6 <text:s/>Merge </text:span><text:span text:style-name="T147">完整範例</text:span></text:h>
      <text:p text:style-name="P29" loext:marker-style-name="T153"><text:span text:style-name="T153"><text:s text:c="2"/>Heap A（NPL=1）： <text:s text:c="5"/>Heap B（NPL=1）：</text:span><text:span text:style-name="T153"/></text:p>
      <text:p text:style-name="P31" loext:marker-style-name="T153"><text:span text:style-name="T153"><text:s text:c="10"/>3 <text:s text:c="21"/>6</text:span><text:span text:style-name="T153"/></text:p>
      <text:p text:style-name="P31" loext:marker-style-name="T153"><text:span text:style-name="T153"><text:s text:c="9"/>/ \ <text:s text:c="18"/>/ \</text:span><text:span text:style-name="T153"/></text:p>
      <text:p text:style-name="P31" loext:marker-style-name="T153"><text:span text:style-name="T153"><text:s text:c="8"/>5 <text:s text:c="2"/>8 <text:s text:c="15"/>12 <text:s text:c="2"/>7</text:span><text:span text:style-name="T153"/></text:p>
      <text:p text:style-name="P31"/>
      <text:p text:style-name="P31" loext:marker-style-name="T153"><text:span text:style-name="T153"><text:s text:c="2"/>Step 1：3 &lt; 6 → 3 為新 Root，遞迴 Merge(A.right=8, B=6)</text:span><text:span text:style-name="T153"/></text:p>
      <text:p text:style-name="P31"/>
      <text:p text:style-name="P31" loext:marker-style-name="T153"><text:span text:style-name="T153"><text:s text:c="2"/>Step 2：Merge(8, 6)：6 &lt; 8 → 6 為新 Root，遞迴 Merge(B.right=7, 8)</text:span><text:span text:style-name="T153"/></text:p>
      <text:p text:style-name="P31"/>
      <text:p text:style-name="P31" loext:marker-style-name="T153"><text:span text:style-name="T153"><text:s text:c="2"/>Step 3：Merge(7, 8)：7 &lt; 8 → 7 為新 Root</text:span><text:span text:style-name="T153"/></text:p>
      <text:p text:style-name="P31" loext:marker-style-name="T153"><text:span text:style-name="T153"><text:s text:c="11"/>Merge(null, 8) = 8 <text:s/>→ <text:s/>7.right = 8</text:span><text:span text:style-name="T153"/></text:p>
      <text:p text:style-name="P31" loext:marker-style-name="T153"><text:span text:style-name="T153"><text:s text:c="11"/>NPL(7.left=null)=-1 &lt; NPL(7.right=8)=0 <text:s/>→ <text:s/>交換左右！</text:span><text:span text:style-name="T153"/></text:p>
      <text:p text:style-name="P31" loext:marker-style-name="T153"><text:span text:style-name="T153"><text:s text:c="11"/>結果：7.left=8, 7.right=null, NPL(7)=0</text:span><text:span text:style-name="T153"/></text:p>
      <text:p text:style-name="P31" loext:marker-style-name="T153"><text:span text:style-name="T153"><text:s text:c="20"/>7</text:span><text:span text:style-name="T153"/></text:p>
      <text:p text:style-name="P31" loext:marker-style-name="T153"><text:span text:style-name="T153"><text:s text:c="19"/>/</text:span><text:span text:style-name="T153"/></text:p>
      <text:p text:style-name="P31" loext:marker-style-name="T153"><text:span text:style-name="T153"><text:s text:c="18"/>8</text:span><text:span text:style-name="T153"/></text:p>
      <text:p text:style-name="P31"/>
      <text:p text:style-name="P31" loext:marker-style-name="T153"><text:span text:style-name="T153"><text:s text:c="2"/>Step 4：回填 Merge(8,6)：6.left=12, 6.right=7</text:span><text:span text:style-name="T153"/></text:p>
      <text:p text:style-name="P31" loext:marker-style-name="T153"><text:span text:style-name="T153"><text:s text:c="11"/>NPL(12)=0 = NPL(7)=0 <text:s/>→ <text:s/>不需交換</text:span><text:span text:style-name="T153"/></text:p>
      <text:p text:style-name="P31" loext:marker-style-name="T153"><text:span text:style-name="T153"><text:s text:c="11"/>NPL(6) = min(0,0)+1 = 1</text:span><text:span text:style-name="T153"/></text:p>
      <text:p text:style-name="P31" loext:marker-style-name="T153"><text:span text:style-name="T153"><text:s text:c="20"/>6 <text:s/>[NPL=1]</text:span><text:span text:style-name="T153"/></text:p>
      <text:p text:style-name="P31" loext:marker-style-name="T153"><text:span text:style-name="T153"><text:s text:c="19"/>/ \</text:span><text:span text:style-name="T153"/></text:p>
      <text:p text:style-name="P31" loext:marker-style-name="T153"><text:span text:style-name="T153"><text:s text:c="17"/>12 <text:s text:c="2"/>7</text:span><text:span text:style-name="T153"/></text:p>
      <text:p text:style-name="P31" loext:marker-style-name="T153"><text:span text:style-name="T153"><text:s text:c="21"/>/</text:span><text:span text:style-name="T153"/></text:p>
      <text:p text:style-name="P31" loext:marker-style-name="T153"><text:span text:style-name="T153"><text:s text:c="20"/>8</text:span><text:span text:style-name="T153"/></text:p>
      <text:p text:style-name="P31"/>
      <text:p text:style-name="P31" loext:marker-style-name="T153"><text:span text:style-name="T153"><text:s text:c="2"/>Step 5：回填 Merge(A,B)：3.left=5, 3.right=6</text:span><text:span text:style-name="T153"/></text:p>
      <text:p text:style-name="P31" loext:marker-style-name="T153"><text:span text:style-name="T153"><text:s text:c="11"/>NPL(3.right=6)=1 &gt; NPL(3.left=5)=0 <text:s/>→ <text:s/>交換左右！</text:span><text:span text:style-name="T153"/></text:p>
      <text:p text:style-name="P32" loext:marker-style-name="T153"><text:span text:style-name="T153"><text:s text:c="11"/>NPL(3) = min(NPL(6),NPL(5))+1 = min(1,0)+1 = 1</text:span><text:span text:style-name="T153"/></text:p>
      <text:p text:style-name="P39"/>
      <text:p text:style-name="P40"><text:s text:c="2"/>最終合併結果（Min Leftist Heap）：</text:p>
      <text:p text:style-name="P31"/>
      <text:p text:style-name="P31" loext:marker-style-name="T153"><text:span text:style-name="T153"><text:s text:c="14"/>3 <text:s/>[NPL=1]</text:span><text:span text:style-name="T153"/></text:p>
      <text:p text:style-name="P31" loext:marker-style-name="T153"><text:span text:style-name="T153"><text:s text:c="13"/>/ \</text:span><text:span text:style-name="T153"/></text:p>
      <text:p text:style-name="P31" loext:marker-style-name="T153"><text:span text:style-name="T153"><text:s text:c="12"/>6 <text:s text:c="2"/>5 <text:s/>[NPL=0]</text:span><text:span text:style-name="T153"/></text:p>
      <text:p text:style-name="P31" loext:marker-style-name="T153"><text:span text:style-name="T153"><text:s text:c="11"/>/ \</text:span><text:span text:style-name="T153"/></text:p>
      <text:p text:style-name="P31" loext:marker-style-name="T153"><text:span text:style-name="T153"><text:s text:c="9"/>12 <text:s text:c="2"/>7 <text:s/>[NPL=0]</text:span><text:span text:style-name="T153"/></text:p>
      <text:p text:style-name="P31" loext:marker-style-name="T153"><text:span text:style-name="T153"><text:s text:c="13"/>/</text:span><text:span text:style-name="T153"/></text:p>
      <text:p text:style-name="P31" loext:marker-style-name="T153"><text:span text:style-name="T153"><text:s text:c="12"/>8</text:span><text:span text:style-name="T153"/></text:p>
      <text:p text:style-name="P31"/>
      <text:p text:style-name="P31" loext:marker-style-name="T153"><text:span text:style-name="T153"><text:s text:c="2"/>驗證 Min Heap：3&lt;6 ✓ <text:s/>3&lt;5 ✓ <text:s/>6&lt;12 ✓ <text:s/>6&lt;7 ✓ <text:s/>7&lt;8 ✓</text:span><text:span text:style-name="T153"/></text:p>
      <text:p text:style-name="P32" loext:marker-style-name="T153"><text:soft-page-break/><text:span text:style-name="T153"><text:s text:c="2"/>驗證左偏性：NPL(6)=1 ≥ NPL(5)=0 ✓ <text:s/>NPL(12)=0 ≥ NPL(7)=0 ✓</text:span><text:span text:style-name="T153"/></text:p>
      <text:p text:style-name="P36"/>
      <text:h text:style-name="P27" text:outline-level="2" loext:marker-style-name="T146"><text:span text:style-name="T146">8-7 <text:s/></text:span><text:span text:style-name="T147">時間複雜度與重點整理</text:span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row table:style-name="表格47.1">
          <table:table-cell table:style-name="表格47.A1" office:value-type="string">
            <text:p text:style-name="Standard" loext:marker-style-name="T219"><text:span text:style-name="T220">操作</text:span><text:span text:style-name="T219"/></text:p>
          </table:table-cell>
          <table:table-cell table:style-name="表格47.A1" office:value-type="string">
            <text:p text:style-name="Standard" loext:marker-style-name="T219"><text:span text:style-name="T220">普通 </text:span><text:span text:style-name="T219">Binary Heap</text:span></text:p>
          </table:table-cell>
          <table:table-cell table:style-name="表格47.A1" office:value-type="string">
            <text:p text:style-name="Standard" loext:marker-style-name="T219"><text:span text:style-name="T219">Leftist Heap</text:span><text:span text:style-name="T219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221"><text:span text:style-name="T221">Insert</text:span><text:span text:style-name="T221"/></text:p>
          </table:table-cell>
          <table:table-cell table:style-name="表格47.A2" office:value-type="string">
            <text:p text:style-name="Standard" loext:marker-style-name="T221"><text:span text:style-name="T221">O(log n)</text:span><text:span text:style-name="T221"/></text:p>
          </table:table-cell>
          <table:table-cell table:style-name="表格47.A2" office:value-type="string">
            <text:p text:style-name="Standard" loext:marker-style-name="T221"><text:span text:style-name="T221">O(log n)</text:span><text:span text:style-name="T221"/></text:p>
          </table:table-cell>
        </table:table-row>
        <table:table-row table:style-name="表格47.1">
          <table:table-cell table:style-name="表格47.A3" office:value-type="string">
            <text:p text:style-name="Standard" loext:marker-style-name="T221"><text:span text:style-name="T221">Extract-Min/Max</text:span><text:span text:style-name="T221"/></text:p>
          </table:table-cell>
          <table:table-cell table:style-name="表格47.A3" office:value-type="string">
            <text:p text:style-name="Standard" loext:marker-style-name="T221"><text:span text:style-name="T221">O(log n)</text:span><text:span text:style-name="T221"/></text:p>
          </table:table-cell>
          <table:table-cell table:style-name="表格47.A3" office:value-type="string">
            <text:p text:style-name="Standard" loext:marker-style-name="T221"><text:span text:style-name="T221">O(log n)</text:span><text:span text:style-name="T221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221"><text:span text:style-name="T221">Merge</text:span><text:span text:style-name="T222">（合併兩個 </text:span><text:span text:style-name="T221">Heap</text:span><text:span text:style-name="T222">）</text:span></text:p>
          </table:table-cell>
          <table:table-cell table:style-name="表格47.A2" office:value-type="string">
            <text:p text:style-name="Standard" loext:marker-style-name="T221"><text:span text:style-name="T221">O(n+m) </text:span><text:span text:style-name="T222">重建</text:span></text:p>
          </table:table-cell>
          <table:table-cell table:style-name="表格47.A2" office:value-type="string">
            <text:p text:style-name="Standard" loext:marker-style-name="T221"><text:span text:style-name="T221">O(log n + log m) ★</text:span><text:span text:style-name="T221"/></text:p>
          </table:table-cell>
        </table:table-row>
      </table:table>
      <text:p text:style-name="P28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33" loext:marker-style-name="T161"><text:span text:style-name="T161">⚠️ <text:s/></text:span><text:span text:style-name="T162">重要：</text:span><text:span text:style-name="T161">Min vs. Max Leftist Heap</text:span></text:p>
            <text:p text:style-name="P33" loext:marker-style-name="T163"><text:span text:style-name="T163">Min Leftist Heap → Merge </text:span><text:span text:style-name="T164">時，較小的 </text:span><text:span text:style-name="T163">Root </text:span><text:span text:style-name="T164">成為新 </text:span><text:span text:style-name="T163">Root</text:span></text:p>
            <text:p text:style-name="P33" loext:marker-style-name="T163"><text:span text:style-name="T163">Max Leftist Heap → Merge </text:span><text:span text:style-name="T164">時，較大的 </text:span><text:span text:style-name="T163">Root </text:span><text:span text:style-name="T164">成為新 </text:span><text:span text:style-name="T163">Root</text:span></text:p>
            <text:p text:style-name="P35" loext:marker-style-name="T163"><text:span text:style-name="T164">演算法步驟完全相同，只有「誰當新 </text:span><text:span text:style-name="T163">Root</text:span><text:span text:style-name="T164">」的比較方向相反。</text:span></text:p>
          </table:table-cell>
        </table:table-row>
      </table:table>
      <text:h text:style-name="P41" text:outline-level="1" loext:marker-style-name="T144"/>
      <text:p text:style-name="P3"/>
      <text:h text:style-name="P4" text:outline-level="1" loext:marker-style-name="T7"><text:span text:style-name="T8">九、</text:span><text:span text:style-name="T9">Heap</text:span><text:span text:style-name="T65"> vs. </text:span><text:span text:style-name="T9">BST / AVL / Red-Black Tree</text:span><text:span text:style-name="T65"> </text:span><text:span text:style-name="T8">深度比較</text:span></text:h>
      <text:p text:style-name="P5" loext:marker-style-name="T67"><text:span text:style-name="T68">這是許多考生最容易混淆的地方，必須徹底釐清各資料結構的設計目的。</text:span><text:span text:style-name="T67"/></text:p>
      <text:p text:style-name="P3"/>
      <text:h text:style-name="P6" text:outline-level="2" loext:marker-style-name="T13"><text:span text:style-name="T14">各結構設計目的一覽</text:span><text:span text:style-name="T13"/></text:h>
      <text:p text:style-name="P3"/>
      <table:table table:name="表格49" table:style-name="表格49">
        <table:table-column table:style-name="表格49.A" table:number-columns-repeated="2"/>
        <table:table-column table:style-name="表格49.C"/>
        <table:table-header-rows>
          <table:table-row table:style-name="表格49.1">
            <table:table-cell table:style-name="表格49.A1" office:value-type="string">
              <text:p text:style-name="P10" loext:marker-style-name="T27"><text:span text:style-name="T28">結構</text:span><text:span text:style-name="T27"/></text:p>
            </table:table-cell>
            <table:table-cell table:style-name="表格49.A1" office:value-type="string">
              <text:p text:style-name="P10" loext:marker-style-name="T27"><text:span text:style-name="T28">設計目的</text:span><text:span text:style-name="T27"/></text:p>
            </table:table-cell>
            <table:table-cell table:style-name="表格49.A1" office:value-type="string">
              <text:p text:style-name="P10" loext:marker-style-name="T27"><text:span text:style-name="T28">核心保證</text:span><text:span text:style-name="T27"/></text:p>
            </table:table-cell>
          </table:table-row>
        </table:table-header-rows>
        <table:table-row table:style-name="表格49.1">
          <table:table-cell table:style-name="表格49.A2" office:value-type="string">
            <text:p text:style-name="P10" loext:marker-style-name="T22"><text:span text:style-name="T23">BST</text:span><text:span text:style-name="T22"/></text:p>
          </table:table-cell>
          <table:table-cell table:style-name="表格49.A2" office:value-type="string">
            <text:p text:style-name="P10" loext:marker-style-name="T22"><text:span text:style-name="T75">快速搜尋特定值</text:span><text:span text:style-name="T22"/></text:p>
          </table:table-cell>
          <table:table-cell table:style-name="表格49.A2" office:value-type="string">
            <text:p text:style-name="P10" loext:marker-style-name="T22"><text:span text:style-name="T75">左 </text:span><text:span text:style-name="T23">&lt; </text:span><text:span text:style-name="T75">根 </text:span><text:span text:style-name="T23">&lt; </text:span><text:span text:style-name="T75">右</text:span></text:p>
          </table:table-cell>
        </table:table-row>
        <table:table-row table:style-name="表格49.1">
          <table:table-cell table:style-name="表格49.A2" office:value-type="string">
            <text:p text:style-name="P10" loext:marker-style-name="T22"><text:span text:style-name="T23">AVL Tree</text:span><text:span text:style-name="T22"/></text:p>
          </table:table-cell>
          <table:table-cell table:style-name="表格49.A2" office:value-type="string">
            <text:p text:style-name="P10" loext:marker-style-name="T22"><text:span text:style-name="T75">平衡 </text:span><text:span text:style-name="T23">BST</text:span><text:span text:style-name="T75">，穩定搜尋</text:span></text:p>
          </table:table-cell>
          <table:table-cell table:style-name="表格49.A2" office:value-type="string">
            <text:p text:style-name="P10" loext:marker-style-name="T22"><text:span text:style-name="T75">高度差 ≤ </text:span><text:span text:style-name="T23">1</text:span><text:span text:style-name="T75">，</text:span><text:span text:style-name="T23">h = O(log n)</text:span></text:p>
          </table:table-cell>
        </table:table-row>
        <table:table-row table:style-name="表格49.1">
          <table:table-cell table:style-name="表格49.A2" office:value-type="string">
            <text:p text:style-name="P10" loext:marker-style-name="T22"><text:span text:style-name="T23">Red-Black Tree</text:span><text:span text:style-name="T22"/></text:p>
          </table:table-cell>
          <table:table-cell table:style-name="表格49.A2" office:value-type="string">
            <text:p text:style-name="P10" loext:marker-style-name="T22"><text:span text:style-name="T75">平衡 </text:span><text:span text:style-name="T23">BST</text:span><text:span text:style-name="T75">，減少旋轉</text:span></text:p>
          </table:table-cell>
          <table:table-cell table:style-name="表格49.A2" office:value-type="string">
            <text:p text:style-name="P10" loext:marker-style-name="T22"><text:span text:style-name="T75">顏色規則，</text:span><text:span text:style-name="T23">h = O(log n)</text:span></text:p>
          </table:table-cell>
        </table:table-row>
        <table:table-row table:style-name="表格49.1">
          <table:table-cell table:style-name="表格49.A2" office:value-type="string">
            <text:p text:style-name="P10" loext:marker-style-name="T22"><text:span text:style-name="T23">Heap</text:span><text:span text:style-name="T22"/></text:p>
          </table:table-cell>
          <table:table-cell table:style-name="表格49.A2" office:value-type="string">
            <text:p text:style-name="P10" loext:marker-style-name="T22"><text:span text:style-name="T75">快速取最大</text:span><text:span text:style-name="T23">/</text:span><text:span text:style-name="T75">最小值</text:span></text:p>
          </table:table-cell>
          <table:table-cell table:style-name="表格49.A2" office:value-type="string">
            <text:p text:style-name="P10" loext:marker-style-name="T22"><text:span text:style-name="T75">父 ≥ 子（</text:span><text:span text:style-name="T23">Max</text:span><text:span text:style-name="T75">）或父 ≤ 子（</text:span><text:span text:style-name="T23">Min</text:span><text:span text:style-name="T75">）</text:span></text:p>
          </table:table-cell>
        </table:table-row>
      </table:table>
      <text:p text:style-name="P3"/>
      <text:h text:style-name="P6" text:outline-level="2" loext:marker-style-name="T13"><text:span text:style-name="T14">時間複雜度全比較</text:span><text:span text:style-name="T13"/></text:h>
      <text:p text:style-name="P3"/>
      <table:table table:name="表格50" table:style-name="表格50">
        <table:table-column table:style-name="表格50.A" table:number-columns-repeated="4"/>
        <table:table-header-rows>
          <text:soft-page-break/>
          <table:table-row table:style-name="表格50.1">
            <table:table-cell table:style-name="表格50.A1" office:value-type="string">
              <text:p text:style-name="P10" loext:marker-style-name="T27"><text:span text:style-name="T140">操作</text:span><text:span text:style-name="T27"/></text:p>
            </table:table-cell>
            <table:table-cell table:style-name="表格50.A1" office:value-type="string">
              <text:p text:style-name="P10" loext:marker-style-name="T27"><text:span text:style-name="T207">BST</text:span><text:span text:style-name="T140">（平衡）</text:span><text:span text:style-name="T207">/ AVL / RB</text:span></text:p>
            </table:table-cell>
            <table:table-cell table:style-name="表格50.A1" office:value-type="string">
              <text:p text:style-name="P10" loext:marker-style-name="T27"><text:span text:style-name="T207">Heap</text:span><text:span text:style-name="T27"/></text:p>
            </table:table-cell>
            <table:table-cell table:style-name="表格50.A1" office:value-type="string">
              <text:p text:style-name="P10" loext:marker-style-name="T27"><text:span text:style-name="T140">說明</text:span><text:span text:style-name="T27"/></text:p>
            </table:table-cell>
          </table:table-row>
        </table:table-header-rows>
        <table:table-row table:style-name="表格50.1">
          <table:table-cell table:style-name="表格50.A2" office:value-type="string">
            <text:p text:style-name="P10" loext:marker-style-name="T22"><text:span text:style-name="T75">搜尋特定值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❌ O(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Heap </text:span><text:span text:style-name="T75">無排序規則</text:span></text:p>
          </table:table-cell>
        </table:table-row>
        <table:table-row table:style-name="表格50.1">
          <table:table-cell table:style-name="表格50.A3" office:value-type="string">
            <text:p text:style-name="P10" loext:marker-style-name="T22"><text:span text:style-name="T75">找最大值（</text:span><text:span text:style-name="T23">view</text:span><text:span text:style-name="T75">）</text:span></text:p>
          </table:table-cell>
          <table:table-cell table:style-name="表格50.A3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3" office:value-type="string">
            <text:p text:style-name="P10" loext:marker-style-name="T22"><text:span text:style-name="T23">✅ O(1)</text:span><text:span text:style-name="T22"/></text:p>
          </table:table-cell>
          <table:table-cell table:style-name="表格50.A3" office:value-type="string">
            <text:p text:style-name="P10" loext:marker-style-name="T22"><text:span text:style-name="T23">Heap Root </text:span><text:span text:style-name="T75">即最大值</text:span></text:p>
          </table:table-cell>
        </table:table-row>
        <table:table-row table:style-name="表格50.1">
          <table:table-cell table:style-name="表格50.A2" office:value-type="string">
            <text:p text:style-name="P10" loext:marker-style-name="T22"><text:span text:style-name="T23">Extract-Max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75">相同</text:span><text:span text:style-name="T22"/></text:p>
          </table:table-cell>
        </table:table-row>
        <table:table-row table:style-name="表格50.1">
          <table:table-cell table:style-name="表格50.A3" office:value-type="string">
            <text:p text:style-name="P10" loext:marker-style-name="T22"><text:span text:style-name="T23">Insert</text:span><text:span text:style-name="T22"/></text:p>
          </table:table-cell>
          <table:table-cell table:style-name="表格50.A3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3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3" office:value-type="string">
            <text:p text:style-name="P10" loext:marker-style-name="T22"><text:span text:style-name="T75">相同</text:span><text:span text:style-name="T22"/></text:p>
          </table:table-cell>
        </table:table-row>
        <table:table-row table:style-name="表格50.1">
          <table:table-cell table:style-name="表格50.A2" office:value-type="string">
            <text:p text:style-name="P10" loext:marker-style-name="T22"><text:span text:style-name="T23">Delete </text:span><text:span text:style-name="T75">任意</text:span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n) </text:span><text:span text:style-name="T75">找 </text:span><text:span text:style-name="T23">+ O(log n) </text:span><text:span text:style-name="T75">刪</text:span></text:p>
          </table:table-cell>
          <table:table-cell table:style-name="表格50.A2" office:value-type="string">
            <text:p text:style-name="P10" loext:marker-style-name="T22"><text:span text:style-name="T23">Heap </text:span><text:span text:style-name="T75">找到要刪的節點要 </text:span><text:span text:style-name="T23">O(n)</text:span></text:p>
          </table:table-cell>
        </table:table-row>
      </table:table>
      <text:p text:style-name="P3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9" loext:marker-style-name="T22"><text:span text:style-name="T23">⚠️ <text:s/></text:span><text:span text:style-name="T75">公職超高頻陷阱題：</text:span></text:p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75">「</text:span><text:span text:style-name="T23">Max Heap </text:span><text:span text:style-name="T75">搜尋某元素的時間複雜度為何？」</text:span></text:p>
          </table:table-cell>
        </table:table-row>
        <table:table-row table:style-name="表格51.1">
          <table:table-cell table:style-name="表格51.A1" office:value-type="string">
            <text:p text:style-name="P9"/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23">❌ </text:span><text:span text:style-name="T75">錯誤答案：</text:span><text:span text:style-name="T23">O(log n) <text:s/>← </text:span><text:span text:style-name="T75">看到樹就聯想 </text:span><text:span text:style-name="T23">log n </text:span><text:span text:style-name="T75">是常見誤區</text:span></text:p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23">✅ </text:span><text:span text:style-name="T75">正確答案：</text:span><text:span text:style-name="T23">O(n)</text:span></text:p>
          </table:table-cell>
        </table:table-row>
        <table:table-row table:style-name="表格51.1">
          <table:table-cell table:style-name="表格51.A1" office:value-type="string">
            <text:p text:style-name="P9"/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75">原因：</text:span><text:span text:style-name="T23">Heap </text:span><text:span text:style-name="T75">只保證「父 ≥ 子」，無法判斷目標在左或右子樹，</text:span></text:p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23"><text:s text:c="6"/></text:span><text:span text:style-name="T75">最壞情況需掃描所有節點。</text:span></text:p>
          </table:table-cell>
        </table:table-row>
      </table:table>
      <text:p text:style-name="P3"/>
      <text:h text:style-name="P6" text:outline-level="2" loext:marker-style-name="T13"><text:span text:style-name="T14">為什麼 </text:span><text:span text:style-name="T15">Linux</text:span><text:span text:style-name="T66"> </text:span><text:span text:style-name="T14">選擇 </text:span><text:span text:style-name="T15">Red-Black Tree</text:span><text:span text:style-name="T66"> </text:span><text:span text:style-name="T14">而非 </text:span><text:span text:style-name="T15">AVL</text:span><text:span text:style-name="T14">？</text:span></text:h>
      <text:list text:continue-list="list2020808128" text:style-name="WWNum2">
        <text:list-item>
          <text:p text:style-name="P24" loext:marker-style-name="T67"><text:span text:style-name="T71">AVL</text:span><text:span text:style-name="T68">：搜尋最快，但插入</text:span><text:span text:style-name="T71">/</text:span><text:span text:style-name="T68">刪除旋轉次數多，修改成本高。</text:span></text:p>
        </text:list-item>
        <text:list-item>
          <text:p text:style-name="P24" loext:marker-style-name="T67"><text:span text:style-name="T71">Red-Black Tree</text:span><text:span text:style-name="T68">：搜尋稍慢，但插入</text:span><text:span text:style-name="T71">/</text:span><text:span text:style-name="T68">刪除旋轉較少，整體效能均衡。</text:span></text:p>
        </text:list-item>
        <text:list-item>
          <text:p text:style-name="P24" loext:marker-style-name="T67"><text:span text:style-name="T71">Linux Kernel </text:span><text:span text:style-name="T68">的 </text:span><text:span text:style-name="T71">CFS </text:span><text:span text:style-name="T68">排程器、記憶體管理（</text:span><text:span text:style-name="T71">VMA</text:span><text:span text:style-name="T68">）、</text:span><text:span text:style-name="T71">Timer </text:span><text:span text:style-name="T68">均採用 </text:span><text:span text:style-name="T71">Red-Black Tree</text:span><text:span text:style-name="T68">。</text:span></text:p>
        </text:list-item>
      </text:list>
      <text:p text:style-name="P3"/>
      <text:p text:style-name="P3"/>
      <text:h text:style-name="P4" text:outline-level="1" loext:marker-style-name="T7"><text:span text:style-name="T8">十、公職考試常見陷阱整理</text:span><text:span text:style-name="T7"/></text:h>
      <text:p text:style-name="P3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1</text:span><text:span text:style-name="T75">：</text:span><text:span text:style-name="T23">Heap </text:span><text:span text:style-name="T75">搜尋 ≠ </text:span><text:span text:style-name="T23">O(log n)</text:span><text:span text:style-name="T75">，正確為 </text:span><text:span text:style-name="T23">O(n)</text:span><text:span text:style-name="T75">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2</text:span><text:span text:style-name="T75">：</text:span><text:span text:style-name="T23">Build Heap ≠ O(n log n)</text:span><text:span text:style-name="T75">，</text:span><text:span text:style-name="T23">Bottom-Up </text:span><text:span text:style-name="T75">法正確為 </text:span><text:span text:style-name="T23">O(n)</text:span><text:span text:style-name="T75">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3</text:span><text:span text:style-name="T75">：</text:span><text:span text:style-name="T23">Heap </text:span><text:span text:style-name="T75">是 </text:span><text:span text:style-name="T23">Complete Binary Tree</text:span><text:span text:style-name="T75">，不是 </text:span><text:span text:style-name="T23">Full Binary Tree</text:span><text:span text:style-name="T75">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ext:soft-page-break/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4</text:span><text:span text:style-name="T75">：陣列索引從 </text:span><text:span text:style-name="T23">1 </text:span><text:span text:style-name="T75">開始，</text:span><text:span text:style-name="T23">parent = ⌊i/2⌋</text:span><text:span text:style-name="T75">（整數除法）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5</text:span><text:span text:style-name="T75">：</text:span><text:span text:style-name="T23">Interval Heap </text:span><text:span text:style-name="T75">每個節點存的是區間 </text:span><text:span text:style-name="T23">[min, max]</text:span><text:span text:style-name="T75">，不是單一值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6</text:span><text:span text:style-name="T75">：</text:span><text:span text:style-name="T23">Merge Leftist Heap </text:span><text:span text:style-name="T75">的新 </text:span><text:span text:style-name="T23">Root </text:span><text:span text:style-name="T75">是兩個 </text:span><text:span text:style-name="T23">Root </text:span><text:span text:style-name="T75">中較小的（</text:span><text:span text:style-name="T23">Min Heap</text:span><text:span text:style-name="T75">），</text:span></text:p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23"><text:s text:c="8"/>Max Leftist Heap </text:span><text:span text:style-name="T75">則是較大的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7</text:span><text:span text:style-name="T75">：</text:span><text:span text:style-name="T23">Heap Sort </text:span><text:span text:style-name="T75">是 </text:span><text:span text:style-name="T23">Unstable Sort</text:span><text:span text:style-name="T75">（不穩定排序）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8</text:span><text:span text:style-name="T75">：</text:span><text:span text:style-name="T23">Heap Sort </text:span><text:span text:style-name="T75">空間複雜度是 </text:span><text:span text:style-name="T23">O(1)</text:span><text:span text:style-name="T75">（</text:span><text:span text:style-name="T23">In-place</text:span><text:span text:style-name="T75">），不需額外空間。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十一、考試必背速查表（最終記憶版）</text:span><text:span text:style-name="T7"/></text:h>
      <text:p text:style-name="P3"/>
      <text:h text:style-name="P6" text:outline-level="2" loext:marker-style-name="T13"><text:span text:style-name="T14">核心定義</text:span><text:span text:style-name="T13"/>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9" loext:marker-style-name="T22"><text:span text:style-name="T23">Heap = Complete Binary Tree + Heap Property</text:span><text:span text:style-name="T75">（</text:span><text:span text:style-name="T23">parent ≤/≥ child</text:span><text:span text:style-name="T75">）</text:span></text:p>
          </table:table-cell>
        </table:table-row>
        <table:table-row table:style-name="表格53.1">
          <table:table-cell table:style-name="表格53.A1" office:value-type="string">
            <text:p text:style-name="P9"/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75">陣列索引（從 </text:span><text:span text:style-name="T23">1 </text:span><text:span text:style-name="T75">起）：</text:span></text:p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23"><text:s text:c="2"/>Root <text:s text:c="4"/>= A[1]</text:span><text:span text:style-name="T22"/></text:p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23"><text:s text:c="2"/>Parent(i) = A[⌊i/2⌋]</text:span><text:span text:style-name="T22"/></text:p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23"><text:s text:c="2"/>Left(i) <text:s/>= A[2i]</text:span><text:span text:style-name="T22"/></text:p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23"><text:s text:c="2"/>Right(i) = A[2i+1]</text:span><text:span text:style-name="T22"/></text:p>
          </table:table-cell>
        </table:table-row>
      </table:table>
      <text:p text:style-name="P3"/>
      <text:h text:style-name="P6" text:outline-level="2" loext:marker-style-name="T13"><text:span text:style-name="T14">時間複雜度速查</text:span><text:span text:style-name="T13"/></text:h>
      <text:p text:style-name="P3"/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10" loext:marker-style-name="T27"><text:span text:style-name="T28">操作</text:span><text:span text:style-name="T27"/></text:p>
            </table:table-cell>
            <table:table-cell table:style-name="表格54.A1" office:value-type="string">
              <text:p text:style-name="P10" loext:marker-style-name="T27"><text:span text:style-name="T28">時間複雜度</text:span><text:span text:style-name="T27"/></text:p>
            </table:table-cell>
            <table:table-cell table:style-name="表格54.A1" office:value-type="string">
              <text:p text:style-name="P10" loext:marker-style-name="T27"><text:span text:style-name="T28">原因</text:span><text:span text:style-name="T27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10" loext:marker-style-name="T22"><text:span text:style-name="T23">Insert</text:span><text:span text:style-name="T75">（</text:span><text:span text:style-name="T23">Bubble Up</text:span><text:span text:style-name="T75">）</text:span></text:p>
          </table:table-cell>
          <table:table-cell table:style-name="表格54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75">最多走 </text:span><text:span text:style-name="T23">h = log n </text:span><text:span text:style-name="T75">層</text:span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23">Extract-Max</text:span><text:span text:style-name="T75">（</text:span><text:span text:style-name="T23">Heapify</text:span><text:span text:style-name="T75">）</text:span></text:p>
          </table:table-cell>
          <table:table-cell table:style-name="表格54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75">最多走 </text:span><text:span text:style-name="T23">h = log n </text:span><text:span text:style-name="T75">層</text:span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23">Build Heap</text:span><text:span text:style-name="T75">（</text:span><text:span text:style-name="T23">Bottom-Up</text:span><text:span text:style-name="T75">）</text:span></text:p>
          </table:table-cell>
          <table:table-cell table:style-name="表格54.A2" office:value-type="string">
            <text:p text:style-name="P10" loext:marker-style-name="T22"><text:span text:style-name="T23">O(n) ★</text:span><text:span text:style-name="T22"/></text:p>
          </table:table-cell>
          <table:table-cell table:style-name="表格54.A2" office:value-type="string">
            <text:p text:style-name="P10" loext:marker-style-name="T22"><text:span text:style-name="T23">Floyd </text:span><text:span text:style-name="T75">演算法</text:span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75">逐個 </text:span><text:span text:style-name="T23">Insert </text:span><text:span text:style-name="T75">建 </text:span><text:span text:style-name="T23">Heap</text:span></text:p>
          </table:table-cell>
          <table:table-cell table:style-name="表格54.A2" office:value-type="string">
            <text:p text:style-name="P10" loext:marker-style-name="T22"><text:span text:style-name="T23">O(n 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23">n </text:span><text:span text:style-name="T75">次 </text:span><text:span text:style-name="T23">× O(log n)</text:span></text:p>
          </table:table-cell>
        </table:table-row>
        <text:soft-page-break/>
        <table:table-row table:style-name="表格54.1">
          <table:table-cell table:style-name="表格54.A2" office:value-type="string">
            <text:p text:style-name="P10" loext:marker-style-name="T22"><text:span text:style-name="T23">Heap Sort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n 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n) + O(n log n)</text:span><text:span text:style-name="T22"/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75">搜尋特定值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n)</text:span><text:span text:style-name="T22"/></text:p>
          </table:table-cell>
          <table:table-cell table:style-name="表格54.A2" office:value-type="string">
            <text:p text:style-name="P10" loext:marker-style-name="T22"><text:span text:style-name="T75">無左右排序規則</text:span><text:span text:style-name="T22"/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23">Merge (Leftist Heap)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log n + log m)</text:span><text:span text:style-name="T22"/></text:p>
          </table:table-cell>
          <table:table-cell table:style-name="表格54.A2" office:value-type="string">
            <text:p text:style-name="P10" loext:marker-style-name="T22"><text:span text:style-name="T75">右側路徑短</text:span><text:span text:style-name="T22"/></text:p>
          </table:table-cell>
        </table:table-row>
      </table:table>
      <text:p text:style-name="P3"/>
      <text:h text:style-name="P6" text:outline-level="2" loext:marker-style-name="T13"><text:span text:style-name="T66">Priority Queue </text:span><text:span text:style-name="T14">三種實作比較</text:span></text:h>
      <text:p text:style-name="P3"/>
      <table:table table:name="表格55" table:style-name="表格55">
        <table:table-column table:style-name="表格55.A" table:number-columns-repeated="3"/>
        <table:table-header-rows>
          <table:table-row table:style-name="表格55.1">
            <table:table-cell table:style-name="表格55.A1" office:value-type="string">
              <text:p text:style-name="P10" loext:marker-style-name="T27"><text:span text:style-name="T28">實作</text:span><text:span text:style-name="T27"/></text:p>
            </table:table-cell>
            <table:table-cell table:style-name="表格55.A1" office:value-type="string">
              <text:p text:style-name="P10" loext:marker-style-name="T27"><text:span text:style-name="T140">Insert</text:span><text:span text:style-name="T27"/></text:p>
            </table:table-cell>
            <table:table-cell table:style-name="表格55.A1" office:value-type="string">
              <text:p text:style-name="P10" loext:marker-style-name="T27"><text:span text:style-name="T140">Extract-Max</text:span><text:span text:style-name="T27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10" loext:marker-style-name="T22"><text:span text:style-name="T75">排序陣列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n)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1) <text:s/></text:span><text:span text:style-name="T75">取快插慢</text:span></text:p>
          </table:table-cell>
        </table:table-row>
        <table:table-row table:style-name="表格55.1">
          <table:table-cell table:style-name="表格55.A2" office:value-type="string">
            <text:p text:style-name="P10" loext:marker-style-name="T22"><text:span text:style-name="T75">未排序陣列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1)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n) <text:s/></text:span><text:span text:style-name="T75">插快取慢</text:span></text:p>
          </table:table-cell>
        </table:table-row>
        <table:table-row table:style-name="表格55.1">
          <table:table-cell table:style-name="表格55.A4" office:value-type="string">
            <text:p text:style-name="P10" loext:marker-style-name="T22"><text:span text:style-name="T23">Max Heap ★</text:span><text:span text:style-name="T22"/></text:p>
          </table:table-cell>
          <table:table-cell table:style-name="表格55.A4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5.A4" office:value-type="string">
            <text:p text:style-name="P10" loext:marker-style-name="T22"><text:span text:style-name="T23">O(log n) <text:s/></text:span><text:span text:style-name="T75">最均衡</text:span></text:p>
          </table:table-cell>
        </table:table-row>
      </table:table>
      <text:p text:style-name="P3"/>
      <text:h text:style-name="P6" text:outline-level="2" loext:marker-style-name="T13"><text:span text:style-name="T66">8 </text:span><text:span text:style-name="T14">句考試必背口訣</text:span></text:h>
      <text:p text:style-name="P3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9" loext:marker-style-name="T22"><text:span text:style-name="T23">1. <text:s/>Heap = Complete BT + Heap Property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2. <text:s/>parent = A[⌊i/2⌋]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3. <text:s/>left child = A[2i]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4. <text:s/>right child = A[2i+1]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5. <text:s/>Insert → Bubble Up → O(log n)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6. <text:s/>Delete/Extract → Heapify</text:span><text:span text:style-name="T75">（</text:span><text:span text:style-name="T23">Bubble Down</text:span><text:span text:style-name="T75">）→ </text:span><text:span text:style-name="T23">O(log n)</text:span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7. <text:s/>Build Heap</text:span><text:span text:style-name="T75">（</text:span><text:span text:style-name="T23">Bottom-Up</text:span><text:span text:style-name="T75">）</text:span><text:span text:style-name="T23">= O(n) <text:s/>★ </text:span><text:span text:style-name="T75">非 </text:span><text:span text:style-name="T23">O(n log n)</text:span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8. <text:s/>Heap Sort = O(n log n)</text:span><text:span text:style-name="T75">，</text:span><text:span text:style-name="T23">In-place</text:span><text:span text:style-name="T75">，</text:span><text:span text:style-name="T23">Unstable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56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6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7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8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9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3T00:14:26</meta:creation-date>
    <meta:initial-creator>Un-named</meta:initial-creator>
    <dc:language>en-US</dc:language>
    <dc:date>2026-06-24T18:47:22.322067800</dc:date>
    <meta:editing-cycles>208</meta:editing-cycles>
    <meta:editing-duration>PT17H16M6S</meta:editing-duration>
    <meta:generator>LibreOffice/26.2.4.2$Windows_X86_64 LibreOffice_project/0229ac93fcf0d7cbc6376066c6f35021cef002dc</meta:generator>
    <meta:document-statistic meta:table-count="56" meta:image-count="0" meta:object-count="0" meta:page-count="31" meta:paragraph-count="843" meta:word-count="7620" meta:character-count="19999" meta:non-whitespace-character-count="13218"/>
    <meta:user-defined meta:name="AppVersion">15.0000</meta:user-defined>
  </office:meta>
</office:document-meta>
</file>