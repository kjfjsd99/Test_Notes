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1" style:family="table">
      <style:table-properties style:width="15.921cm" fo:margin-left="0.071cm" fo:margin-top="0cm" fo:margin-bottom="0cm" table:align="left" style:writing-mode="page"/>
    </style:style>
    <style:style style:name="表格M1.A" style:family="table-column">
      <style:table-column-properties style:column-width="15.921cm"/>
    </style:style>
    <style:style style:name="表格M1.1" style:family="table-row">
      <style:table-row-properties fo:keep-together="auto"/>
    </style:style>
    <style:style style:name="表格M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2" style:family="table">
      <style:table-properties style:width="15.921cm" fo:margin-left="0.071cm" fo:margin-top="0cm" fo:margin-bottom="0cm" table:align="left" style:writing-mode="page"/>
    </style:style>
    <style:style style:name="表格M2.A" style:family="table-column">
      <style:table-column-properties style:column-width="15.921cm"/>
    </style:style>
    <style:style style:name="表格M2.1" style:family="table-row">
      <style:table-row-properties fo:keep-together="auto"/>
    </style:style>
    <style:style style:name="表格M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3" style:family="table">
      <style:table-properties style:width="15.921cm" fo:margin-left="0.071cm" fo:margin-top="0cm" fo:margin-bottom="0cm" table:align="left" style:writing-mode="page"/>
    </style:style>
    <style:style style:name="表格M3.A" style:family="table-column">
      <style:table-column-properties style:column-width="15.921cm"/>
    </style:style>
    <style:style style:name="表格M3.1" style:family="table-row">
      <style:table-row-properties fo:keep-together="auto"/>
    </style:style>
    <style:style style:name="表格M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4" style:family="table">
      <style:table-properties style:width="15.921cm" fo:margin-left="0.071cm" fo:margin-top="0cm" fo:margin-bottom="0cm" table:align="left" style:writing-mode="page"/>
    </style:style>
    <style:style style:name="表格M4.A" style:family="table-column">
      <style:table-column-properties style:column-width="15.921cm"/>
    </style:style>
    <style:style style:name="表格M4.1" style:family="table-row">
      <style:table-row-properties fo:keep-together="auto"/>
    </style:style>
    <style:style style:name="表格M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5" style:family="table">
      <style:table-properties style:width="15.921cm" fo:margin-left="0.071cm" fo:margin-top="0cm" fo:margin-bottom="0cm" table:align="left" style:writing-mode="page"/>
    </style:style>
    <style:style style:name="表格M5.A" style:family="table-column">
      <style:table-column-properties style:column-width="15.921cm"/>
    </style:style>
    <style:style style:name="表格M5.1" style:family="table-row">
      <style:table-row-properties fo:keep-together="auto"/>
    </style:style>
    <style:style style:name="表格M5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6" style:family="table">
      <style:table-properties style:width="15.921cm" fo:margin-left="0.071cm" fo:margin-top="0cm" fo:margin-bottom="0cm" table:align="left" style:writing-mode="page"/>
    </style:style>
    <style:style style:name="表格M6.A" style:family="table-column">
      <style:table-column-properties style:column-width="15.921cm"/>
    </style:style>
    <style:style style:name="表格M6.1" style:family="table-row">
      <style:table-row-properties fo:keep-together="auto"/>
    </style:style>
    <style:style style:name="表格M6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N1" style:family="table">
      <style:table-properties style:width="15.921cm" fo:margin-left="0.071cm" fo:margin-top="0cm" fo:margin-bottom="0cm" table:align="left" style:writing-mode="page"/>
    </style:style>
    <style:style style:name="表格N1.A" style:family="table-column">
      <style:table-column-properties style:column-width="15.921cm"/>
    </style:style>
    <style:style style:name="表格N1.1" style:family="table-row">
      <style:table-row-properties fo:keep-together="auto"/>
    </style:style>
    <style:style style:name="表格N1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8" style:family="table">
      <style:table-properties style:width="15.921cm" fo:margin-left="0.071cm" fo:margin-top="0cm" fo:margin-bottom="0cm" table:align="left" style:writing-mode="page"/>
    </style:style>
    <style:style style:name="表格M8.A" style:family="table-column">
      <style:table-column-properties style:column-width="15.921cm"/>
    </style:style>
    <style:style style:name="表格M8.1" style:family="table-row">
      <style:table-row-properties fo:keep-together="auto"/>
    </style:style>
    <style:style style:name="表格M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9" style:family="table">
      <style:table-properties style:width="15.921cm" fo:margin-left="0.071cm" fo:margin-top="0cm" fo:margin-bottom="0cm" table:align="left" style:writing-mode="page"/>
    </style:style>
    <style:style style:name="表格M9.A" style:family="table-column">
      <style:table-column-properties style:column-width="15.921cm"/>
    </style:style>
    <style:style style:name="表格M9.1" style:family="table-row">
      <style:table-row-properties fo:keep-together="auto"/>
    </style:style>
    <style:style style:name="表格M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X1" style:family="table">
      <style:table-properties style:width="15.921cm" fo:margin-left="0.071cm" fo:margin-top="0cm" fo:margin-bottom="0cm" table:align="left" style:writing-mode="page"/>
    </style:style>
    <style:style style:name="表格X1.A" style:family="table-column">
      <style:table-column-properties style:column-width="15.921cm"/>
    </style:style>
    <style:style style:name="表格X1.1" style:family="table-row">
      <style:table-row-properties fo:keep-together="auto"/>
    </style:style>
    <style:style style:name="表格X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X2" style:family="table">
      <style:table-properties style:width="15.921cm" fo:margin-left="0.071cm" fo:margin-top="0cm" fo:margin-bottom="0cm" table:align="left" style:writing-mode="page"/>
    </style:style>
    <style:style style:name="表格X2.A" style:family="table-column">
      <style:table-column-properties style:column-width="15.921cm"/>
    </style:style>
    <style:style style:name="表格X2.1" style:family="table-row">
      <style:table-row-properties fo:keep-together="auto"/>
    </style:style>
    <style:style style:name="表格X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X3" style:family="table">
      <style:table-properties style:width="15.921cm" fo:margin-left="0.071cm" fo:margin-top="0cm" fo:margin-bottom="0cm" table:align="left" style:writing-mode="page"/>
    </style:style>
    <style:style style:name="表格X3.A" style:family="table-column">
      <style:table-column-properties style:column-width="15.921cm"/>
    </style:style>
    <style:style style:name="表格X3.1" style:family="table-row">
      <style:table-row-properties fo:keep-together="auto"/>
    </style:style>
    <style:style style:name="表格X3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X4" style:family="table">
      <style:table-properties style:width="15.921cm" fo:margin-left="0.071cm" fo:margin-top="0cm" fo:margin-bottom="0cm" table:align="left" style:writing-mode="page"/>
    </style:style>
    <style:style style:name="表格X4.A" style:family="table-column">
      <style:table-column-properties style:column-width="15.921cm"/>
    </style:style>
    <style:style style:name="表格X4.1" style:family="table-row">
      <style:table-row-properties fo:keep-together="auto"/>
    </style:style>
    <style:style style:name="表格X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M11" style:family="table">
      <style:table-properties style:width="15.921cm" fo:margin-left="0.071cm" fo:margin-top="0cm" fo:margin-bottom="0cm" table:align="left" style:writing-mode="page"/>
    </style:style>
    <style:style style:name="表格M11.A" style:family="table-column">
      <style:table-column-properties style:column-width="15.921cm"/>
    </style:style>
    <style:style style:name="表格M11.1" style:family="table-row">
      <style:table-row-properties fo:keep-together="auto"/>
    </style:style>
    <style:style style:name="表格M1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16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17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22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23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24" style:family="paragraph" style:parent-style-name="Standard" style:list-style-name="WWNum2">
      <style:paragraph-properties fo:margin-top="0.071cm" fo:margin-bottom="0.071cm" style:contextual-spacing="false"/>
    </style:style>
    <style:style style:name="P25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2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8" style:family="paragraph" style:parent-style-name="Standard">
      <style:paragraph-properties fo:margin-top="0cm" fo:margin-bottom="0.212cm" style:contextual-spacing="false"/>
    </style:style>
    <style:style style:name="P29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32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33" style:family="paragraph" style:parent-style-name="Standard">
      <style:paragraph-properties fo:margin-top="0cm" fo:margin-bottom="0.141cm" style:contextual-spacing="false"/>
    </style:style>
    <style:style style:name="P34" style:family="paragraph" style:parent-style-name="List_20_Paragraph" style:list-style-name="WWNum14">
      <style:paragraph-properties fo:margin-top="0cm" fo:margin-bottom="0.141cm" style:contextual-spacing="false"/>
    </style:style>
    <style:style style:name="P35" style:family="paragraph" style:parent-style-name="Standard">
      <style:paragraph-properties fo:margin-top="0cm" fo:margin-bottom="0cm" style:contextual-spacing="false"/>
    </style:style>
    <style:style style:name="P36" style:family="paragraph" style:parent-style-name="Standard">
      <style:paragraph-properties fo:margin-top="0cm" fo:margin-bottom="0.282cm" style:contextual-spacing="false"/>
    </style:style>
    <style:style style:name="P37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38" style:family="paragraph" style:parent-style-name="Standard">
      <style:text-properties fo:color="#ffff00" loext:opacity="100%" style:font-name="Arial1" fo:font-size="11pt" fo:font-weight="bold" fo:background-color="#ff9100" style:font-name-asian="Arial2" style:font-size-asian="11pt" style:font-weight-asian="bold" style:font-name-complex="Arial2" style:font-size-complex="11pt" style:font-weight-complex="bold"/>
    </style:style>
    <style:style style:name="P39" style:family="paragraph" style:parent-style-name="Standard">
      <style:text-properties fo:color="#f8bbd0" loext:opacity="100%" style:font-name="Arial1" fo:font-size="11pt" fo:font-weight="bold" fo:background-color="#880e4f" style:font-name-asian="Arial2" style:font-size-asian="11pt" style:font-weight-asian="bold" style:font-name-complex="Arial2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fo:color="#ffab40" loext:opacity="100%" fo:font-weight="bold" fo:background-color="#311b92" style:font-weight-asian="bold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color="#ffff00" loext:opacity="100%" style:font-name="Arial1" fo:font-size="12pt" fo:font-weight="bold" fo:background-color="#ff9100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margin-top="0cm" fo:margin-bottom="0.282cm" style:contextual-spacing="false"/>
      <style:text-properties fo:color="#ffff00" loext:opacity="100%" fo:font-weight="bold" fo:background-color="#ff9100" style:font-weight-asian="bold" style:font-weight-complex="bold"/>
    </style:style>
    <style:style style:name="P43" style:family="paragraph" style:parent-style-name="Standard">
      <style:paragraph-properties fo:margin-top="0cm" fo:margin-bottom="0.212cm" style:contextual-spacing="false"/>
      <style:text-properties officeooo:paragraph-rsid="0127fdc1"/>
    </style:style>
    <style:style style:name="P44" style:family="paragraph" style:parent-style-name="Text_20_body">
      <style:paragraph-properties fo:margin-top="0cm" fo:margin-bottom="0.212cm" style:contextual-spacing="false"/>
      <style:text-properties fo:color="#1a1a1a" loext:opacity="100%" fo:font-size="12pt" style:font-size-asian="12pt" style:font-size-complex="12pt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fo:color="#1a1a1a" loext:opacity="100%" fo:font-size="12pt" style:font-size-asian="12pt" style:font-size-complex="12pt"/>
    </style:style>
    <style:style style:name="P46" style:family="paragraph" style:parent-style-name="Text_20_body" style:list-style-name="L1">
      <style:text-properties fo:color="#1a1a1a" loext:opacity="100%" fo:font-size="12pt" style:font-size-asian="12pt" style:font-size-complex="12pt"/>
    </style:style>
    <style:style style:name="P47" style:family="paragraph" style:parent-style-name="Heading_20_3">
      <style:paragraph-properties fo:margin-top="0cm" fo:margin-bottom="0.212cm" style:contextual-spacing="false"/>
      <style:text-properties fo:color="#1a1a1a" loext:opacity="100%" style:font-name="Arial1" style:font-name-asian="Arial2"/>
    </style:style>
    <style:style style:name="P48" style:family="paragraph" style:parent-style-name="Preformatted_20_Text">
      <style:paragraph-properties fo:margin-left="0cm" fo:margin-right="0cm" fo:margin-top="0cm" fo:margin-bottom="0.212cm" style:contextual-spacing="false" fo:text-indent="0cm" style:auto-text-indent="false"/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P49" style:family="paragraph" style:parent-style-name="Horizontal_20_Line">
      <style:paragraph-properties fo:margin-top="0cm" fo:margin-bottom="0.212cm" style:contextual-spacing="false"/>
      <style:text-properties fo:color="#1a1a1a" loext:opacity="100%" fo:font-size="12pt" style:font-size-asian="12pt" style:font-size-complex="12pt"/>
    </style:style>
    <style:style style:name="P50" style:family="paragraph" style:parent-style-name="Preformatted_20_Text">
      <style:paragraph-properties fo:margin-top="0cm" fo:margin-bottom="0.212cm" style:contextual-spacing="false"/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P51" style:family="paragraph" style:parent-style-name="Heading_20_2">
      <style:paragraph-properties fo:margin-top="0cm" fo:margin-bottom="0.212cm" style:contextual-spacing="false"/>
      <style:text-properties fo:color="#1a1a1a" loext:opacity="100%" fo:font-size="12pt" style:font-size-asian="12pt" style:font-size-complex="12pt"/>
    </style:style>
    <style:style style:name="P52" style:family="paragraph" style:parent-style-name="Quotations">
      <style:paragraph-properties fo:margin-top="0cm" fo:margin-bottom="0.212cm" style:contextual-spacing="false"/>
      <style:text-properties fo:color="#1a1a1a" loext:opacity="100%" fo:font-size="12pt" style:font-size-asian="12pt" style:font-size-complex="12pt"/>
    </style:style>
    <style:style style:name="P53" style:family="paragraph" style:parent-style-name="Standard">
      <style:paragraph-properties fo:margin-top="0cm" fo:margin-bottom="0.212cm" style:contextual-spacing="false"/>
      <style:text-properties fo:color="#1a1a1a" loext:opacity="100%" style:font-name="Arial1" fo:font-size="12pt" officeooo:paragraph-rsid="0127fdc1" style:font-size-asian="12pt" style:font-name-complex="Arial2" style:font-size-complex="12pt"/>
    </style:style>
    <style:style style:name="P54" style:family="paragraph" style:parent-style-name="Standard">
      <style:paragraph-properties fo:margin-top="0cm" fo:margin-bottom="0.212cm" style:contextual-spacing="false"/>
      <style:text-properties officeooo:paragraph-rsid="012abe0a"/>
    </style:style>
    <style:style style:name="P55" style:family="paragraph" style:parent-style-name="Text_20_body">
      <style:paragraph-properties fo:margin-top="0cm" fo:margin-bottom="0.212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margin-left="0cm" fo:margin-right="0cm" fo:margin-top="0cm" fo:margin-bottom="0.212cm" style:contextual-spacing="false" fo:text-indent="0cm" style:auto-text-indent="false"/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7" style:family="paragraph" style:parent-style-name="Preformatted_20_Text">
      <style:paragraph-properties fo:margin-top="0cm" fo:margin-bottom="0.212cm" style:contextual-spacing="false"/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8" style:family="paragraph" style:parent-style-name="Text_20_body" style:list-style-name="L2">
      <style:paragraph-properties fo:margin-top="0cm" fo:margin-bottom="0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59" style:family="paragraph" style:parent-style-name="Text_20_body" style:list-style-name="L2"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0" style:family="paragraph" style:parent-style-name="Quotations">
      <style:paragraph-properties fo:margin-top="0cm" fo:margin-bottom="0.212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1" style:family="paragraph" style:parent-style-name="Horizontal_20_Line">
      <style:paragraph-properties fo:margin-top="0cm" fo:margin-bottom="0.212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2" style:family="paragraph" style:parent-style-name="Heading_20_3">
      <style:paragraph-properties fo:margin-top="0cm" fo:margin-bottom="0.212cm" style:contextual-spacing="false"/>
      <style:text-properties fo:color="#1a1a1a" loext:opacity="100%" style:font-name="Arial1" fo:font-weight="bold" style:font-name-asian="Arial2" style:font-weight-asian="bold" style:font-weight-complex="bold"/>
    </style:style>
    <style:style style:name="P63" style:family="paragraph" style:parent-style-name="Text_20_body" style:list-style-name="L3">
      <style:paragraph-properties fo:margin-top="0cm" fo:margin-bottom="0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4" style:family="paragraph" style:parent-style-name="Text_20_body" style:list-style-name="L3"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5" style:family="paragraph" style:parent-style-name="Text_20_body" style:list-style-name="L4">
      <style:paragraph-properties fo:margin-top="0cm" fo:margin-bottom="0cm" style:contextual-spacing="false"/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6" style:family="paragraph" style:parent-style-name="Text_20_body" style:list-style-name="L4">
      <style:text-properties fo:color="#1a1a1a" loext:opacity="100%"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.212cm" style:contextual-spacing="false"/>
      <style:text-properties fo:color="#1a1a1a" loext:opacity="100%" style:font-name="Arial1" fo:font-size="12pt" fo:font-weight="bold" officeooo:paragraph-rsid="012abe0a" style:font-size-asian="12pt" style:font-weight-asian="bold" style:font-name-complex="Arial2" style:font-size-complex="12pt" style:font-weight-complex="bold"/>
    </style:style>
    <style:style style:name="P68" style:family="paragraph" style:parent-style-name="Standard">
      <style:paragraph-properties fo:margin-top="0cm" fo:margin-bottom="0.212cm" style:contextual-spacing="false"/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P69" style:family="paragraph" style:parent-style-name="Standard">
      <style:paragraph-properties fo:margin-top="0cm" fo:margin-bottom="0cm" style:contextual-spacing="false"/>
      <style:text-properties fo:color="#76ff03" loext:opacity="100%" fo:font-weight="bold" fo:background-color="#311b92" style:font-weight-asian="bold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43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44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45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47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4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9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53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60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62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63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6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67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68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9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595959" loext:opacity="100%" fo:font-size="11pt" style:font-size-asian="11pt" style:font-name-complex="Arial2" style:font-size-complex="11pt"/>
    </style:style>
    <style:style style:name="T72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75" style:family="text">
      <style:text-properties fo:color="#595959" loext:opacity="100%" fo:font-size="10.5pt" style:font-size-asian="10.5pt" style:font-name-complex="Arial2" style:font-size-complex="10.5pt"/>
    </style:style>
    <style:style style:name="T76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8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9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82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88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9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90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96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98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04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05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06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11" style:family="text">
      <style:text-properties fo:font-weight="bold" fo:background-color="#ffd740" loext:char-shading-value="0" style:font-weight-asian="bold" style:font-weight-complex="bold"/>
    </style:style>
    <style:style style:name="T112" style:family="text">
      <style:text-properties fo:font-weight="bold" fo:background-color="#18ffff" loext:char-shading-value="0" style:font-weight-asian="bold" style:font-weight-complex="bold"/>
    </style:style>
    <style:style style:name="T113" style:family="text">
      <style:text-properties fo:font-weight="bold" fo:background-color="#ffff00" loext:char-shading-value="0" style:font-weight-asian="bold" style:font-weight-complex="bold"/>
    </style:style>
    <style:style style:name="T114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15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8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19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20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21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30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1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3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34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137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138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139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0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141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46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47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48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49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50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51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52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53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54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55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6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7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8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60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1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62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63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64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65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66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67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9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70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1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2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73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74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75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76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77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78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79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0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1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82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83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84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5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86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89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90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91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92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93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4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5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6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97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98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99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200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01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02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03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04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205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206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207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8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09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10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11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12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4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15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16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17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18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2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20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21" style:family="text">
      <style:text-properties fo:font-size="10.5pt" style:font-name-asian="Arial2" style:font-size-asian="10.5pt" style:font-name-complex="Arial2" style:font-size-complex="10.5pt"/>
    </style:style>
    <style:style style:name="T222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23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24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25" style:family="text">
      <style:text-properties fo:color="#76ff03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26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7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28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9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30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231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232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3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4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5" style:family="text">
      <style:text-properties style:font-name="Arial1" fo:font-size="12pt" style:font-size-asian="12pt" style:font-name-complex="Arial2" style:font-size-complex="12pt"/>
    </style:style>
    <style:style style:name="T236" style:family="text">
      <style:text-properties style:font-name="Arial1" fo:font-size="12pt" style:font-name-asian="Arial2" style:font-size-asian="12pt" style:font-name-complex="Arial2" style:font-size-complex="12pt"/>
    </style:style>
    <style:style style:name="T237" style:family="text">
      <style:text-properties fo:color="#ffff00" loext:opacity="100%" style:font-name="Arial1" fo:font-size="12pt" fo:font-weight="bold" fo:background-color="#ff9100" loext:char-shading-value="0" style:font-name-asian="Arial2" style:font-size-asian="12pt" style:font-weight-asian="bold" style:font-name-complex="Arial2" style:font-size-complex="12pt" style:font-weight-complex="bold"/>
    </style:style>
    <style:style style:name="T238" style:family="text">
      <style:text-properties fo:color="#ffea00" loext:opacity="100%" style:font-name="Courier New" fo:font-size="9.5pt" fo:font-weight="bold" fo:background-color="#b71c1c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9" style:family="text">
      <style:text-properties fo:color="#76ff03" loext:opacity="100%" style:font-name="Courier New" fo:font-size="9.5pt" fo:font-weight="bold" fo:background-color="#33691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0" style:family="text">
      <style:text-properties fo:color="#64ffda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241" style:family="text">
      <style:text-properties fo:color="#76ff03" loext:opacity="100%" style:font-name="Courier New" fo:font-size="9.5pt" fo:font-weight="bold" fo:background-color="#006064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2" style:family="text">
      <style:text-properties fo:color="#18ffff" loext:opacity="100%" style:font-name="Arial1" fo:font-size="12pt" fo:font-weight="bold" fo:background-color="#01579b" loext:char-shading-value="0" style:font-size-asian="12pt" style:font-weight-asian="bold" style:font-name-complex="Arial2" style:font-size-complex="12pt" style:font-weight-complex="bold"/>
    </style:style>
    <style:style style:name="T243" style:family="text">
      <style:text-properties fo:color="#ffea00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244" style:family="text">
      <style:text-properties fo:color="#c6ff00" loext:opacity="100%" style:font-name="Arial1" fo:font-size="12pt" fo:font-weight="bold" fo:background-color="#4a148c" loext:char-shading-value="0" style:font-size-asian="12pt" style:font-weight-asian="bold" style:font-name-complex="Arial2" style:font-size-complex="12pt" style:font-weight-complex="bold"/>
    </style:style>
    <style:style style:name="T245" style:family="text">
      <style:text-properties fo:color="#76ff03" loext:opacity="100%" style:font-name="Arial1" fo:font-size="12pt" fo:font-weight="bold" fo:background-color="#006064" loext:char-shading-value="0" style:font-name-asian="Arial2" style:font-size-asian="12pt" style:font-weight-asian="bold" style:font-name-complex="Arial2" style:font-size-complex="12pt" style:font-weight-complex="bold"/>
    </style:style>
    <style:style style:name="T246" style:family="text">
      <style:text-properties fo:color="#eeeeee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247" style:family="text">
      <style:text-properties fo:color="#64ffda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248" style:family="text">
      <style:text-properties fo:color="#ffff00" loext:opacity="100%" style:font-name="Arial1" fo:font-size="12pt" fo:font-weight="bold" fo:background-color="#ff6e40" loext:char-shading-value="0" style:font-size-asian="12pt" style:font-weight-asian="bold" style:font-name-complex="Arial2" style:font-size-complex="12pt" style:font-weight-complex="bold"/>
    </style:style>
    <style:style style:name="T249" style:family="text">
      <style:text-properties fo:color="#eeeeee" loext:opacity="100%" style:font-name="Courier New" fo:font-size="9.5pt" fo:font-weight="bold" fo:background-color="#b71c1c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0" style:family="text">
      <style:text-properties fo:color="#76ff03" loext:opacity="100%" style:font-name="Arial1" fo:font-size="12pt" fo:font-weight="bold" fo:background-color="#1b5e20" loext:char-shading-value="0" style:font-size-asian="12pt" style:font-weight-asian="bold" style:font-name-complex="Arial2" style:font-size-complex="12pt" style:font-weight-complex="bold"/>
    </style:style>
    <style:style style:name="T251" style:family="text">
      <style:text-properties fo:color="#2e75b6" loext:opacity="100%" style:font-name="Arial1" fo:font-size="15pt" fo:font-weight="bold" fo:background-color="#ff6e40" loext:char-shading-value="0" style:font-size-asian="15pt" style:font-weight-asian="bold" style:font-name-complex="Arial2" style:font-size-complex="15pt" style:font-weight-complex="bold"/>
    </style:style>
    <style:style style:name="T252" style:family="text">
      <style:text-properties fo:color="#ffff00" loext:opacity="100%" style:font-name="Arial1" fo:font-size="15pt" fo:font-weight="bold" fo:background-color="#ff6e40" loext:char-shading-value="0" style:font-size-asian="15pt" style:font-weight-asian="bold" style:font-name-complex="Arial2" style:font-size-complex="15pt" style:font-weight-complex="bold"/>
    </style:style>
    <style:style style:name="T253" style:family="text">
      <style:text-properties fo:color="#2b2b2b" loext:opacity="100%" style:font-name="Courier New" fo:font-size="9.5pt" fo:font-weight="bold" fo:background-color="#ffd74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4" style:family="text">
      <style:text-properties fo:color="#2b2b2b" loext:opacity="100%" style:font-name="Courier New" fo:font-size="9.5pt" fo:font-weight="bold" fo:background-color="#76ff03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5" style:family="text">
      <style:text-properties fo:color="#fafafa" loext:opacity="100%" style:font-name="Courier New" fo:font-size="9.5pt" fo:font-weight="bold" fo:background-color="#ff408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6" style:family="text">
      <style:text-properties fo:color="#ffea0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7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258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59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60" style:family="text">
      <style:text-properties fo:color="#1a1a1a" loext:opacity="100%" style:font-name="Arial1" fo:font-size="12pt" fo:font-weight="bold" fo:background-color="#ff6e40" loext:char-shading-value="0" style:font-size-asian="12pt" style:font-weight-asian="bold" style:font-name-complex="Arial2" style:font-size-complex="12pt" style:font-weight-complex="bold"/>
    </style:style>
    <style:style style:name="T261" style:family="text">
      <style:text-properties fo:color="#ffea00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262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263" style:family="text">
      <style:text-properties fo:color="#1a1a1a" loext:opacity="100%" style:font-name="Arial1" fo:font-size="12pt" fo:font-weight="bold" fo:background-color="#69f0ae" loext:char-shading-value="0" style:font-size-asian="12pt" style:font-weight-asian="bold" style:font-name-complex="Arial2" style:font-size-complex="12pt" style:font-weight-complex="bold"/>
    </style:style>
    <style:style style:name="T264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5" style:family="text">
      <style:text-properties fo:color="#ffea00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266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67" style:family="text">
      <style:text-properties fo:color="#64ffda" loext:opacity="100%" style:font-name="Courier New" fo:font-size="9.5pt" fo:font-weight="bold" fo:background-color="#004d4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2560771874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42">Parent = A[5/2] = A[2] </text:span><text:span text:style-name="T23">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</text:span><text:span text:style-name="T43">Left child = A[10]</text:span><text:span text:style-name="T24">，</text:span><text:span text:style-name="T44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5">陣列索引從 </text:span><text:span text:style-name="T38">1 </text:span><text:span text:style-name="T45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</text:span><text:span text:style-name="T46">預設從 </text:span><text:span text:style-name="T47">1 </text:span><text:span text:style-name="T46">開始</text:span><text:span text:style-name="T24">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185008081696959" text:continue-list="list2560771874" text:style-name="WWNum7">
        <text:list-item>
          <text:p text:style-name="P11" loext:marker-style-name="T16"><text:span text:style-name="T48">Step 1</text:span><text:span text:style-name="T18">：</text:span><text:span text:style-name="T49">將新元素放到陣列最後一個位置</text:span><text:span text:style-name="T18">（</text:span><text:span text:style-name="T48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8">Step 2</text:span><text:span text:style-name="T18">：</text:span><text:span text:style-name="T50">與父節點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9">
          <text:p text:style-name="P13" loext:marker-style-name="T16"><text:span text:style-name="T48">Step 3</text:span><text:span text:style-name="T18">：重複 </text:span><text:span text:style-name="T48">Step 2</text:span><text:span text:style-name="T18">，一路往上，直到滿足 </text:span><text:span text:style-name="T48">Heap Property </text:span><text:span text:style-name="T18">或抵達 </text:span><text:span text:style-name="T48">Root </text:span><text:span text:style-name="T18">為止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插入 </text:span><text:span text:style-name="T53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54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55">95 </text:span><text:span text:style-name="T56">的 </text:span><text:span text:style-name="T55">parent = A[7/2] = A[3]</text:span><text:span text:style-name="T23">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7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8">95</text:span><text:span text:style-name="T23">, 70, 60, 50, </text:span><text:span text:style-name="T58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55">95 </text:span><text:span text:style-name="T56">的 </text:span><text:span text:style-name="T55">parent = A[3/2] = A[1]</text:span><text:span text:style-name="T23">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7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15" loext:marker-style-name="T22"><text:span text:style-name="T23"><text:s text:c="5"/>/ <text:s/>\ <text:s text:c="2"/>/</text:span><text:span text:style-name="T2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16" loext:marker-style-name="T22"><text:s/><text:span text:style-name="T23">70 <text:s/>60 50 <text:s/>80</text:span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9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185007850660493" text:continue-list="list185008081696959" text:style-name="WWNum10">
        <text:list-item>
          <text:p text:style-name="P17" loext:marker-style-name="T16"><text:span text:style-name="T48">Step 1</text:span><text:span text:style-name="T18">：</text:span><text:span text:style-name="T49">取出 </text:span><text:span text:style-name="T60">Root</text:span><text:span text:style-name="T49">（最大值）</text:span><text:span text:style-name="T18">。</text:span></text:p>
        </text:list-item>
        <text:list-item text:style-override="WWNum11">
          <text:p text:style-name="P18" loext:marker-style-name="T16"><text:span text:style-name="T48">Step 2</text:span><text:span text:style-name="T18">：</text:span><text:span text:style-name="T61">將陣列最後一個元素移到 </text:span><text:span text:style-name="T39">Root </text:span><text:span text:style-name="T61">位置。</text:span></text:p>
        </text:list-item>
        <text:list-item text:style-override="WWNum12">
          <text:p text:style-name="P19" loext:marker-style-name="T16"><text:span text:style-name="T48">Step 3</text:span><text:span text:style-name="T18">：</text:span><text:span text:style-name="T50">與兩個子節點中</text:span><text:span text:style-name="T62">較大的</text:span><text:span text:style-name="T50">比較</text:span><text:span text:style-name="T18">，若違反 </text:span><text:span text:style-name="T48">Heap Property</text:span><text:span text:style-name="T18">，則交換。</text:span></text:p>
        </text:list-item>
        <text:list-item text:style-override="WWNum13">
          <text:p text:style-name="P20" loext:marker-style-name="T16"><text:span text:style-name="T48">Step 4</text:span><text:span text:style-name="T18">：重複 </text:span><text:span text:style-name="T48">Step 3</text:span><text:span text:style-name="T18">（</text:span><text:span text:style-name="T48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51"><text:span text:style-name="T52">完整範例：</text:span><text:span text:style-name="T53">Max Heap </text:span><text:span text:style-name="T52">刪除 </text:span><text:span text:style-name="T53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</text:span><text:span text:style-name="T45">把最後元素 </text:span><text:span text:style-name="T38">50 </text:span><text:span text:style-name="T45">移到 </text:span><text:span text:style-name="T38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42">50 </text:span><text:span text:style-name="T63">的子節點 </text:span><text:span text:style-name="T42">90</text:span><text:span text:style-name="T63">、</text:span><text:span text:style-name="T42">80</text:span><text:span text:style-name="T63">，較大為 </text:span><text:span text:style-name="T42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42">50 </text:span><text:span text:style-name="T63">的子節點 </text:span><text:span text:style-name="T42">70</text:span><text:span text:style-name="T63">、</text:span><text:span text:style-name="T42">60</text:span><text:span text:style-name="T63">，較大為 </text:span><text:span text:style-name="T42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64">時間複雜度：</text:span><text:span text:style-name="T58">O(log n) </text:span><text:span text:style-name="T23">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65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66">A</text:span><text:span text:style-name="T14">：逐個插入法</text:span></text:h>
      <text:p text:style-name="P5" loext:marker-style-name="T67"><text:span text:style-name="T68">從</text:span><text:span text:style-name="T69">空</text:span><text:span text:style-name="T68"> </text:span><text:span text:style-name="T70">Heap</text:span><text:span text:style-name="T71"> </text:span><text:span text:style-name="T68">開始，呼叫 </text:span><text:span text:style-name="T72">n </text:span><text:span text:style-name="T73">次 </text:span><text:span text:style-name="T72">Insert</text:span><text:span text:style-name="T68">，每次 </text:span><text:span text:style-name="T74">O(log n)</text:span><text:span text:style-name="T68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75">總時間：</text:span><text:span text:style-name="T76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66">B</text:span><text:span text:style-name="T14">：</text:span><text:span text:style-name="T15">Bottom-Up Build Heap</text:span><text:span text:style-name="T14">（</text:span><text:span text:style-name="T15">Floyd</text:span><text:span text:style-name="T66"> </text:span><text:span text:style-name="T14">演算法）★考試重點★</text:span></text:h>
      <text:p text:style-name="P5" loext:marker-style-name="T67"><text:span text:style-name="T68">直接</text:span><text:span text:style-name="T77">將 </text:span><text:span text:style-name="T78">n </text:span><text:span text:style-name="T77">個元素放入陣列</text:span><text:span text:style-name="T68">，從</text:span><text:span text:style-name="T69">最後一個非葉節點（</text:span><text:span text:style-name="T79">index = ⌊n/2⌋</text:span><text:span text:style-name="T69">）開始</text:span><text:span text:style-name="T68">，</text:span><text:span text:style-name="T80">由下往上</text:span><text:span text:style-name="T68">逐一執行 </text:span><text:span text:style-name="T71">Heapify</text:span><text:span text:style-name="T68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 loext:marker-style-name="T81"><text:span text:style-name="T81">★ </text:span><text:span text:style-name="T82">為何從 <text:s text:c="2"/>?</text:span><text:span text:style-name="T81"> <text:s/>⌊n/2⌋ </text:span><text:span text:style-name="T82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83">的節點全部都是葉節點</text:span><text:span text:style-name="T75">（</text:span><text:span text:style-name="T84">無子節點</text:span><text:span text:style-name="T75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葉節點本身已滿足 </text:span><text:span text:style-name="T23">Heap Property(</text:span><text:span text:style-name="T76">Heap Property</text:span><text:span text:style-name="T85">就是比較父節點</text:span><text:span text:style-name="T76">vs</text:span><text:span text:style-name="T85">子節點</text:span><text:span text:style-name="T75">；</text:span><text:span text:style-name="T86">葉節點沒有孩子 → 沒有東西可以比較 </text:span><text:span text:style-name="T24">→ 一定合法</text:span><text:span text:style-name="T75">。</text:span><text:span text:style-name="T23">)</text:span><text:span text:style-name="T75">，不需要 </text:span><text:span text:style-name="T23">Heapify</text:span><text:span text:style-name="T75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75">因此</text:span><text:span text:style-name="T87">只需從 </text:span><text:span text:style-name="T39">index ⌊n/2⌋ </text:span><text:span text:style-name="T87">往 </text:span><text:span text:style-name="T39">index 1 </text:span><text:span text:style-name="T87">逐一執行</text:span><text:span text:style-name="T75">。</text:span></text:p>
          </table:table-cell>
        </table:table-row>
      </table:table>
      <text:p text:style-name="P3"/>
      <text:p text:style-name="P22" loext:marker-style-name="T67"><text:span text:style-name="T88">範例：將 </text:span><text:span text:style-name="T89">[50, 30, 80, 10, 20, 70, 90] </text:span><text:span text:style-name="T88">建成 </text:span><text:span text:style-name="T89">Max Heap <text:s text:c="61"/></text:span></text:p>
      <text:p text:style-name="P22" loext:marker-style-name="T67"><text:span text:style-name="T89"/></text:p>
      <text:p text:style-name="P22" loext:marker-style-name="T67"><text:span text:style-name="T89">(</text:span><text:span text:style-name="T90">index = ⌊n/2⌋為最後一個非葉節點；index &gt; ⌊n/2⌋ 的節點全部都是葉節點</text:span><text:span text:style-name="T89">)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75">初始陣列（</text:span><text:span text:style-name="T23">index </text:span><text:span text:style-name="T75">從 </text:span><text:span text:style-name="T23">1 </text:span><text:span text:style-name="T75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75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75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75">，</text:span><text:span text:style-name="T91">最後非葉節點 </text:span><text:span text:style-name="T9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（</text:span><text:span text:style-name="T93">index 4</text:span><text:span text:style-name="T94">、</text:span><text:span text:style-name="T93">5</text:span><text:span text:style-name="T94">、</text:span><text:span text:style-name="T93">6</text:span><text:span text:style-name="T94">、</text:span><text:span text:style-name="T93">7 </text:span><text:span text:style-name="T94">皆為葉節點</text:span><text:span text:style-name="T75">，不需 </text:span><text:span text:style-name="T23">Heapify</text:span><text:span text:style-name="T75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75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</text:span><text:span text:style-name="T95"> </text:span><text:span text:style-name="T96">Heapify(3)</text:span><text:span text:style-name="T97">：</text:span><text:span text:style-name="T96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子節點：</text:span><text:span text:style-name="T23">index 6 = 70</text:span><text:span text:style-name="T75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8">Max Heap </text:span><text:span text:style-name="T98">要求父 ≥ 子</text:span><text:span text:style-name="T75">，但 </text:span><text:span text:style-name="T23">80 &lt; 90 → </text:span><text:span text:style-name="T75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與 </text:span><text:span text:style-name="T23">90 </text:span><text:span text:style-name="T75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75">上來了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75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</text:span><text:span text:style-name="T96"> Heapify(2)</text:span><text:span text:style-name="T97">：</text:span><text:span text:style-name="T96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子節點：</text:span><text:span text:style-name="T23">index 4 = 10</text:span><text:span text:style-name="T75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54">30 ≥ 20 </text:span><text:span text:style-name="T99">且 </text:span><text:span text:style-name="T54">30 ≥ 10 → </text:span><text:span text:style-name="T99">符合 </text:span><text:span text:style-name="T54">Max Heap → </text:span><text:span text:style-name="T99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75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</text:span><text:span text:style-name="T96">Heapify(1)</text:span><text:span text:style-name="T97">：</text:span><text:span text:style-name="T96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子節點：</text:span><text:span text:style-name="T23">index 2 = 30</text:span><text:span text:style-name="T75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90 &gt; 50 → </text:span><text:span text:style-name="T26">50 </text:span><text:span text:style-name="T100">與 </text:span><text:span text:style-name="T26">9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1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</text:span><text:span text:style-name="T101">50 </text:span><text:span text:style-name="T102">下沉到 </text:span><text:span text:style-name="T101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0">50 </text:span><text:span text:style-name="T86">繼續下沉</text:span><text:span text:style-name="T75">：子節點 </text:span><text:span text:style-name="T23">index 6 = 70</text:span><text:span text:style-name="T75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83">較大子節點</text:span><text:span text:style-name="T75">為 </text:span><text:span text:style-name="T23">80 &gt; 50 → </text:span><text:span text:style-name="T26">50 </text:span><text:span text:style-name="T100">與 </text:span><text:span text:style-name="T26">80 </text:span><text:span text:style-name="T100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第 </text:span><text:span text:style-name="T23">2 </text:span><text:span text:style-name="T75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75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4"/>10 <text:s/>20 70 <text:s/>50 <text:s text:c="3"/>← 50 </text:span><text:span text:style-name="T75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75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5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75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75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66">★ </text:span><text:span text:style-name="T59">為何 </text:span><text:span text:style-name="T103">Bottom-Up Build Heap</text:span><text:span text:style-name="T104"> =</text:span><text:span text:style-name="T66"> </text:span><text:span text:style-name="T105">O(n)</text:span><text:span text:style-name="T14">？</text:span></text:h>
      <text:p text:style-name="P5" loext:marker-style-name="T67"><text:span text:style-name="T68">關鍵直覺：</text:span><text:span text:style-name="T80">每個節點 </text:span><text:span text:style-name="T106">Heapify </text:span><text:span text:style-name="T80">的代價 </text:span><text:span text:style-name="T106">= </text:span><text:span text:style-name="T80">它在樹中的「高度」</text:span><text:span text:style-name="T68">（</text:span><text:span text:style-name="T107">往下最多能走幾層</text:span><text:span text:style-name="T68">）。</text:span></text:p>
      <text:p text:style-name="P5" loext:marker-style-name="T67"><text:span text:style-name="T108">高度愈低的節點數量愈多，代價愈小；高度愈高的節點數量愈少，代價愈大</text:span><text:span text:style-name="T68">。</text:span><text:span text:style-name="T109">兩者相乘加總後收斂至 </text:span><text:span text:style-name="T74">O(n)</text:span><text:span text:style-name="T68">。</text:span></text:p>
      <text:p text:style-name="P3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9">★ 為何 Build Heap 是 O(n)？</text:p>
            <text:p text:style-name="P9"/>
            <text:p text:style-name="P9">Build Heap 由下往上<text:span text:style-name="T110">對每個非葉節點執行 Heapify</text:span>。</text:p>
            <text:p text:style-name="P9"/>
            <text:p text:style-name="P9">以完全二元樹為例：</text:p>
            <text:p text:style-name="P9"/>
            <text:p text:style-name="P9"><text:span text:style-name="T111">高度0（葉節點）約有 </text:span><text:span text:style-name="T112">n/2</text:span><text:span text:style-name="T111"> 個</text:span>，<text:span text:style-name="T113">每個最多移動 0 步</text:span></text:p>
            <text:p text:style-name="P9"><text:span text:style-name="T111">高度1 約有 </text:span><text:span text:style-name="T112">n/4</text:span><text:span text:style-name="T111"> 個</text:span>，<text:span text:style-name="T113">每個最多移動 1 步</text:span></text:p>
            <text:p text:style-name="P9"><text:span text:style-name="T111">高度2 約有 </text:span><text:span text:style-name="T112">n/8</text:span><text:span text:style-name="T111"> 個</text:span>，<text:span text:style-name="T113">每個最多移動 2 步</text:span></text:p>
            <text:p text:style-name="P9"><text:span text:style-name="T111">高度3 約有 </text:span><text:span text:style-name="T112">n/16</text:span><text:span text:style-name="T111"> 個</text:span>，<text:span text:style-name="T113">每個最多移動 3 步</text:span></text:p>
            <text:p text:style-name="P9">...</text:p>
            <text:p text:style-name="P9"/>
            <text:p text:style-name="P9">因此總成本為：</text:p>
            <text:p text:style-name="P9"/>
            <text:p text:style-name="P9">T(n) ≈ (n/2)×0</text:p>
            <text:p text:style-name="P9"/>
            <text:p text:style-name="P9">* (n/4)×1</text:p>
            <text:p text:style-name="P9">* (n/8)×2</text:p>
            <text:p text:style-name="P9">* (n/16)×3</text:p>
            <text:p text:style-name="P9">* ...</text:p>
            <text:p text:style-name="P9"/>
            <text:p text:style-name="P9">觀察可知：</text:p>
            <text:p text:style-name="P9"/>
            <text:p text:style-name="P23">越往上，Heapify 可能移動的步數增加 1，</text:p>
            <text:p text:style-name="P9"><text:span text:style-name="T114">但節點數量卻減少一半</text:span>。</text:p>
            <text:p text:style-name="P9"/>
            <text:p text:style-name="P9">例如：</text:p>
            <text:p text:style-name="P9"/>
            <text:p text:style-name="P9">高度1： (<text:span text:style-name="T113">n/4</text:span>)×<text:span text:style-name="T111">1</text:span></text:p>
            <text:p text:style-name="P9">高度2： (<text:span text:style-name="T113">n/8</text:span>)×<text:span text:style-name="T111">2</text:span></text:p>
            <text:p text:style-name="P9">高度3： (<text:span text:style-name="T113">n/16</text:span>)×<text:span text:style-name="T111">3</text:span></text:p>
            <text:p text:style-name="P9"/>
            <text:p text:style-name="P9">可以看到<text:span text:style-name="T115">節點數減少的速度比成本增加的速度更快</text:span>。</text:p>
            <text:p text:style-name="P9"/>
            <text:p text:style-name="P9">因此<text:span text:style-name="T116">所有層的成本加總後不會達到 O(n log n)，而是 O(n)</text:span>。</text:p>
            <text:p text:style-name="P9"/>
            <text:p text:style-name="P9">結論：</text:p>
            <text:p text:style-name="P9"/>
            <text:p text:style-name="P9"><text:span text:style-name="T117">葉節點很多，但幾乎不用移動</text:span>；</text:p>
            <text:p text:style-name="P9"><text:span text:style-name="T118">根附近節點雖然較貴，但數量很少</text:span>。</text:p>
            <text:p text:style-name="P9"/>
            <text:p text:style-name="P9"><text:span text:style-name="T116">所以 </text:span><text:span text:style-name="T119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75">白話理解：</text:span><text:span text:style-name="T120">葉節點約佔一半，</text:span><text:span text:style-name="T121">Heapify </text:span><text:span text:style-name="T120">代價為 </text:span><text:span text:style-name="T121">0</text:span><text:span text:style-name="T75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 loext:marker-style-name="T122"><text:span text:style-name="T123">往上每層節點數減半，代價只加 </text:span><text:span text:style-name="T122">1</text:span><text:span text:style-name="T123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124">整體工作量被大量葉節點的「零代價」攤平</text:span><text:span text:style-name="T75">，總代價 ∝ </text:span><text:span text:style-name="T23">n</text:span><text:span text:style-name="T75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125"><text:span text:style-name="T126">逐個 </text:span><text:span text:style-name="T125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75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125"><text:span text:style-name="T125">Bottom-Up Build Heap</text:span><text:span text:style-name="T125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75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67"><text:span text:style-name="T71">Heap Sort </text:span><text:span text:style-name="T68">利用 </text:span><text:span text:style-name="T71">Heap </text:span><text:span text:style-name="T68">結構進行排序，分為兩個階段：</text:span></text:p>
      <text:p text:style-name="P3"/>
      <text:list xml:id="list4053014634" text:style-name="WWNum2">
        <text:list-item>
          <text:p text:style-name="P24" loext:marker-style-name="T67"><text:span text:style-name="T71">Phase 1</text:span><text:span text:style-name="T68">：</text:span><text:span text:style-name="T127">Build Heap</text:span><text:span text:style-name="T71"> — </text:span><text:span text:style-name="T128">將原始陣列建成 </text:span><text:span text:style-name="T129">Max Heap</text:span><text:span text:style-name="T68">，時間 </text:span><text:span text:style-name="T71">O(n)</text:span><text:span text:style-name="T68">。</text:span></text:p>
        </text:list-item>
        <text:list-item>
          <text:p text:style-name="P24" loext:marker-style-name="T67"><text:span text:style-name="T71">Phase 2</text:span><text:span text:style-name="T68">：</text:span><text:span text:style-name="T69">反覆 </text:span><text:span text:style-name="T79">Extract-Max</text:span><text:span text:style-name="T71"> — </text:span><text:span text:style-name="T130">取出 </text:span><text:span text:style-name="T131">Root</text:span><text:span text:style-name="T130">（最大值），放到陣列末端</text:span><text:span text:style-name="T68">，</text:span><text:span text:style-name="T132">再 </text:span><text:span text:style-name="T70">Heapify</text:span><text:span text:style-name="T68">，重複 </text:span><text:span text:style-name="T133">n-1</text:span><text:span text:style-name="T71"> </text:span><text:span text:style-name="T68">次，每次 </text:span><text:span text:style-name="T71">O(</text:span><text:span text:style-name="T106">log n</text:span><text:span text:style-name="T71">)</text:span><text:span text:style-name="T68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75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76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空間複雜度 </text:span><text:span text:style-name="T23">= O(1)</text:span><text:span text:style-name="T75">（</text:span><text:span text:style-name="T23">In-place</text:span><text:span text:style-name="T75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75">穩定性 </text:span><text:span text:style-name="T23">= </text:span><text:span text:style-name="T75">不穩定（</text:span><text:span text:style-name="T23">Unstable</text:span><text:span text:style-name="T75">）</text:span></text:p>
          </table:table-cell>
        </table:table-row>
      </table:table>
      <text:p text:style-name="P3"/>
      <text:p text:style-name="P5" loext:marker-style-name="T67"><text:span text:style-name="T88">範例：對 </text:span><text:span text:style-name="T89">[4, 2, 7, 1, 5] </text:span><text:span text:style-name="T88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125">Build Max Heap</text:span><text:span text:style-name="T75">：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75">，</text:span><text:span text:style-name="T134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75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75">：</text:span><text:span text:style-name="T26">2 </text:span><text:span text:style-name="T100">的子節點 </text:span><text:span text:style-name="T26">1, 5</text:span><text:span text:style-name="T75">；</text:span><text:span text:style-name="T76">5 &gt; 2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75">：</text:span><text:span text:style-name="T26">4 </text:span><text:span text:style-name="T100">的子節點 </text:span><text:span text:style-name="T26">5, 7</text:span><text:span text:style-name="T75">；</text:span><text:span text:style-name="T76">7 &gt; 4 → </text:span><text:span text:style-name="T85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75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35">反覆</text:span><text:span text:style-name="T75"> </text:span><text:span text:style-name="T38">Extract-Max</text:span><text:span text:style-name="T75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75">：</text:span><text:span text:style-name="T136">取出 </text:span><text:span text:style-name="T137">Root=7</text:span><text:span text:style-name="T136">，末端 </text:span><text:span text:style-name="T137">2 </text:span><text:span text:style-name="T136">移到 </text:span><text:span text:style-name="T137">Root</text:span><text:span text:style-name="T75">，</text:span><text:span text:style-name="T5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75">：</text:span><text:span text:style-name="T136">取出 </text:span><text:span text:style-name="T137">Root=5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5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75">：</text:span><text:span text:style-name="T136">取出 </text:span><text:span text:style-name="T137">Root=4</text:span><text:span text:style-name="T136">，末端 </text:span><text:span text:style-name="T137">1 </text:span><text:span text:style-name="T136">移到 </text:span><text:span text:style-name="T137">Root</text:span><text:span text:style-name="T75">，</text:span><text:span text:style-name="T138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75">：</text:span><text:span text:style-name="T136">取出 </text:span><text:span text:style-name="T137">Root=2</text:span><text:span text:style-name="T136">，末端 </text:span><text:span text:style-name="T137">1 </text:span><text:span text:style-name="T136">移到 </text:span><text:span text:style-name="T137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60"><text:span text:style-name="T86">最終排序（升冪）：</text:span><text:span text:style-name="T60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67"><text:span text:style-name="T131">Priority Queue</text:span><text:span text:style-name="T130">（優先佇列）</text:span><text:span text:style-name="T68">是</text:span><text:span text:style-name="T107">每次取出「優先值最高」元素的資料結構</text:span><text:span text:style-name="T68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39">Insert</text:span><text:span text:style-name="T27"/></text:p>
            </table:table-cell>
            <table:table-cell table:style-name="表格23.A1" office:value-type="string">
              <text:p text:style-name="P25"><text:span text:style-name="T140">Extract-Max</text:span><text:span text:style-name="T141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126">排序好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126">未排序的</text:span><text:span text:style-name="T75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76"><text:span text:style-name="T76">O(log n)</text:span><text:span text:style-name="T76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75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75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83">是 </text:span><text:span text:style-name="T38">Priority Queue </text:span><text:span text:style-name="T83">最常見的實作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原因是 </text:span><text:span text:style-name="T76">Insert </text:span><text:span text:style-name="T85">和 </text:span><text:span text:style-name="T76">Extract </text:span><text:span text:style-name="T85">都是 </text:span><text:span text:style-name="T76">O(log n)</text:span><text:span text:style-name="T75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是</text:span><text:span text:style-name="T86">三種方案中最均衡的折衷解</text:span><text:span text:style-name="T75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75">應用場景：印表機緩衝（高優先文件先印）、作業系統 </text:span><text:span text:style-name="T23">CPU </text:span><text:span text:style-name="T75">排程。</text:span></text:p>
          </table:table-cell>
        </table:table-row>
      </table:table>
      <text:p text:style-name="P3"/>
      <text:p text:style-name="P3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126">排序好的</text:span><text:span text:style-name="T75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挪動 </text:span><text:span text:style-name="T23">70, 80 </text:span><text:span text:style-name="T75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8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75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126">未排序的</text:span><text:span text:style-name="T75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75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75">掃描</text:span><text:span text:style-name="T23">: 80? 10? 30? 70? 50? <text:s/>→ </text:span><text:span text:style-name="T75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75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75">：放末端，</text:span><text:span text:style-name="T23">Bubble Up </text:span><text:span text:style-name="T75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60">50 </text:span><text:span text:style-name="T86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76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35" office:value-type="string">
            <text:p text:style-name="P9"><text:span text:style-name="T23">Extract-Max</text:span><text:span text:style-name="T75">：</text:span><text:span text:style-name="T84">取出 </text:span><text:span text:style-name="T142">Root=80</text:span><text:span text:style-name="T75">，</text:span><text:span text:style-name="T82">末端</text:span><text:span text:style-name="T143"> </text:span><text:span text:style-name="T144">50 </text:span><text:span text:style-name="T82">補位</text:span><text:span text:style-name="T75">，</text:span><text:span text:style-name="T23">Heapify </text:span><text:span text:style-name="T75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75">取出 </text:span><text:span text:style-name="T23">80 <text:s text:c="5"/>50 </text:span><text:span text:style-name="T75">移到 </text:span><text:span text:style-name="T23">Root <text:s text:c="4"/>Heapify </text:span><text:span text:style-name="T75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76">O(log n)</text:span></text:p>
          </table:table-cell>
        </table:table-row>
      </table:table>
      <text:p text:style-name="P3"/>
      <text:h text:style-name="P26" text:outline-level="1" loext:marker-style-name="T145"><text:span text:style-name="T146">七、</text:span><text:span text:style-name="T145">Interval Heap</text:span><text:span text:style-name="T146">（區間堆積）【</text:span><text:span text:style-name="T145">110</text:span><text:span text:style-name="T146">地</text:span><text:span text:style-name="T145">Q4</text:span><text:span text:style-name="T146">】</text:span></text:h>
      <text:h text:style-name="P27" text:outline-level="2" loext:marker-style-name="T147"><text:span text:style-name="T147">7-1 <text:s/></text:span><text:span text:style-name="T148">問題起源：</text:span><text:span text:style-name="T149">普通 </text:span><text:span text:style-name="T150">Heap</text:span><text:span text:style-name="T147"> </text:span><text:span text:style-name="T151">只能快速取一端</text:span></text:h>
      <text:p text:style-name="P28" loext:marker-style-name="T152"><text:span text:style-name="T153">回顧你已學過的 </text:span><text:span text:style-name="T152">Max Heap</text:span><text:span text:style-name="T153">：</text:span></text:p>
      <text:p text:style-name="P29" loext:marker-style-name="T154"><text:span text:style-name="T154"><text:s text:c="11"/>100 <text:s text:c="6"/>← </text:span><text:span text:style-name="T155">Root</text:span><text:span text:style-name="T154"> = 全域最大值（</text:span><text:span text:style-name="T155">O(1) 取得</text:span><text:span text:style-name="T154">）</text:span></text:p>
      <text:p text:style-name="P30"><text:s text:c="10"/>/ <text:s text:c="3"/>\</text:p>
      <text:p text:style-name="P31" loext:marker-style-name="T154"><text:span text:style-name="T154"><text:s text:c="8"/>90 <text:s text:c="5"/>80</text:span><text:span text:style-name="T154"/></text:p>
      <text:p text:style-name="P31" loext:marker-style-name="T154"><text:span text:style-name="T154"><text:s text:c="7"/>/ <text:s/>\</text:span><text:span text:style-name="T154"/></text:p>
      <text:p text:style-name="P31" loext:marker-style-name="T154"><text:span text:style-name="T154"><text:s text:c="6"/>70 <text:s text:c="2"/>60</text:span><text:span text:style-name="T154"/></text:p>
      <text:p text:style-name="P31"/>
      <text:p text:style-name="P31" loext:marker-style-name="T154"><text:span text:style-name="T154"><text:s text:c="2"/>Find-Max <text:s/>= O(1) <text:s/>直接</text:span><text:span text:style-name="T155">看 Root</text:span></text:p>
      <text:p text:style-name="P32" loext:marker-style-name="T154"><text:span text:style-name="T154"><text:s text:c="2"/></text:span><text:span text:style-name="T156">Find-Min <text:s/>= O(n)</text:span><text:span text:style-name="T154"> <text:s/></text:span><text:span text:style-name="T157">最小值藏在某個葉節點，不知在哪，</text:span><text:span text:style-name="T158">只能全掃</text:span></text:p>
      <text:p text:style-name="P33"/>
      <text:p text:style-name="P28" loext:marker-style-name="T152"><text:span text:style-name="T152">Max Heap </text:span><text:span text:style-name="T153">有一個致命弱點：</text:span></text:p>
      <text:list text:style-name="WWNum14">
        <text:list-item>
          <text:p text:style-name="P34" loext:marker-style-name="T152"><text:span text:style-name="T153">取最大值 → </text:span><text:span text:style-name="T152">O(1)</text:span><text:span text:style-name="T153">，非常快，因為 </text:span><text:span text:style-name="T152">Root </text:span><text:span text:style-name="T153">就是最大值。</text:span></text:p>
        </text:list-item>
        <text:list-item>
          <text:p text:style-name="P34" loext:marker-style-name="T152"><text:span text:style-name="T159">取最小值 → </text:span><text:span text:style-name="T160">O(n)</text:span><text:span text:style-name="T153">，</text:span><text:span text:style-name="T161">非常慢，因為最小值可能藏在任何一個葉節點，沒有規律可循。</text:span></text:p>
        </text:list-item>
      </text:list>
      <text:p text:style-name="P3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3" loext:marker-style-name="T162"><text:span text:style-name="T162">❓ </text:span><text:span text:style-name="T163">想一想：最小值在哪裡？</text:span></text:p>
            <text:p text:style-name="P33" loext:marker-style-name="T164"><text:span text:style-name="T165">以上面的 </text:span><text:span text:style-name="T164">Max Heap </text:span><text:span text:style-name="T165">為例，最小值 </text:span><text:span text:style-name="T164">60 </text:span><text:span text:style-name="T165">藏在葉節點。</text:span></text:p>
            <text:p text:style-name="P35" loext:marker-style-name="T164"><text:span text:style-name="T165">如果樹有 </text:span><text:span text:style-name="T164">n </text:span><text:span text:style-name="T165">個節點，不掃到最後一層根本不知道最小值在哪。</text:span></text:p>
          </table:table-cell>
        </table:table-row>
      </table:table>
      <text:p text:style-name="P36"><text:soft-page-break/></text:p>
      <text:h text:style-name="P27" text:outline-level="2" loext:marker-style-name="T147"><text:span text:style-name="T147">7-2 <text:s/></text:span><text:span text:style-name="T149">現實需求</text:span><text:span text:style-name="T148">：</text:span><text:span text:style-name="T151">兩端都要快</text:span></text:h>
      <text:p text:style-name="P28" loext:marker-style-name="T152"><text:span text:style-name="T153">在</text:span><text:span text:style-name="T166">很多實際應用中</text:span><text:span text:style-name="T153">，我們</text:span><text:span text:style-name="T167">同時需要快速取出最大值和最小值</text:span><text:span text:style-name="T153">：</text:span></text:p>
      <text:p text:style-name="P33"/>
      <text:p text:style-name="P29" loext:marker-style-name="T154"><text:span text:style-name="T154"><text:s text:c="2"/>📈 股票交易系統：</text:span><text:span text:style-name="T154"/></text:p>
      <text:p text:style-name="P31" loext:marker-style-name="T154"><text:span text:style-name="T154"><text:s text:c="7"/>→ 最高價（最大值）O(1) 快速取得</text:span><text:span text:style-name="T154"/></text:p>
      <text:p text:style-name="P31" loext:marker-style-name="T154"><text:span text:style-name="T154"><text:s text:c="7"/>→ 最低價（最小值）O(1) 快速取得</text:span><text:span text:style-name="T154"/></text:p>
      <text:p text:style-name="P31"/>
      <text:p text:style-name="P31" loext:marker-style-name="T154"><text:span text:style-name="T154"><text:s text:c="2"/>🖥️ <text:s/>CPU 排程器（雙優先權模式）：</text:span><text:span text:style-name="T154"/></text:p>
      <text:p text:style-name="P31" loext:marker-style-name="T154"><text:span text:style-name="T154"><text:s text:c="7"/>→ 最高優先權工作 <text:s/>→ 優先執行</text:span><text:span text:style-name="T154"/></text:p>
      <text:p text:style-name="P31" loext:marker-style-name="T154"><text:span text:style-name="T154"><text:s text:c="7"/>→ 最低優先權工作 <text:s/>→ 必要時踢出讓位</text:span><text:span text:style-name="T154"/></text:p>
      <text:p text:style-name="P31"/>
      <text:p text:style-name="P31" loext:marker-style-name="T154"><text:span text:style-name="T154"><text:s text:c="2"/>❌ </text:span><text:span text:style-name="T155">普通 Max Heap</text:span><text:span text:style-name="T154"> 做不到：</text:span><text:span text:style-name="T168">找最小值要</text:span><text:span text:style-name="T158"> O(n)</text:span></text:p>
      <text:p text:style-name="P32" loext:marker-style-name="T154"><text:span text:style-name="T154"><text:s text:c="2"/>❌ </text:span><text:span text:style-name="T155">普通 Min Heap</text:span><text:span text:style-name="T154"> 做不到：</text:span><text:span text:style-name="T168">找最大值要</text:span><text:span text:style-name="T158"> O(n)</text:span></text:p>
      <text:p text:style-name="P33"/>
      <text:p text:style-name="P28" loext:marker-style-name="T152"><text:span text:style-name="T153">這類需求稱為 </text:span><text:span text:style-name="T152">Double-Ended Priority Queue</text:span><text:span text:style-name="T153">（</text:span><text:span text:style-name="T152">DEPQ</text:span><text:span text:style-name="T153">，</text:span><text:span text:style-name="T169">雙端優先佇列</text:span><text:span text:style-name="T153">），</text:span><text:span text:style-name="T161">目標是</text:span><text:span text:style-name="T153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3" loext:marker-style-name="T162"><text:span text:style-name="T162">Extract-Min</text:span><text:span text:style-name="T163">（</text:span><text:span text:style-name="T170">取出最小值</text:span><text:span text:style-name="T163">）</text:span><text:span text:style-name="T162">= </text:span><text:span text:style-name="T171">O(log n)</text:span></text:p>
            <text:p text:style-name="P35" loext:marker-style-name="T162"><text:span text:style-name="T162">Extract-Max</text:span><text:span text:style-name="T163">（</text:span><text:span text:style-name="T170">取出最大值</text:span><text:span text:style-name="T163">）</text:span><text:span text:style-name="T162">= </text:span><text:span text:style-name="T171">O(log n)</text:span></text:p>
          </table:table-cell>
        </table:table-row>
      </table:table>
      <text:p text:style-name="P36"/>
      <text:h text:style-name="P27" text:outline-level="2" loext:marker-style-name="T147"><text:span text:style-name="T147">7-3 <text:s/>Interval Heap </text:span><text:span text:style-name="T148">的核心設計</text:span></text:h>
      <text:p text:style-name="P28" loext:marker-style-name="T152"><text:span text:style-name="T172">Interval Heap </text:span><text:span text:style-name="T173">的靈感</text:span><text:span text:style-name="T153">：</text:span><text:span text:style-name="T161">把 </text:span><text:span text:style-name="T174">Min Heap </text:span><text:span text:style-name="T161">和 </text:span><text:span text:style-name="T174">Max Heap</text:span><text:span text:style-name="T175">「疊」在同一棵樹上</text:span><text:span text:style-name="T153">。</text:span></text:p>
      <text:p text:style-name="P28" loext:marker-style-name="T152"><text:span text:style-name="T176">具體做法：</text:span><text:span text:style-name="T177">每個節點不再存一個值</text:span><text:span text:style-name="T153">，</text:span><text:span text:style-name="T167">改成存一個「區間」</text:span><text:span text:style-name="T178">[min_val, max_val]</text:span><text:span text:style-name="T153">：</text:span></text:p>
      <text:p text:style-name="P29" loext:marker-style-name="T154"><text:span text:style-name="T154"><text:s text:c="2"/></text:span><text:span text:style-name="T179">普通</text:span><text:span text:style-name="T154"> Heap 節點： <text:s text:c="9"/>Interval Heap 節點：</text:span></text:p>
      <text:p text:style-name="P31" loext:marker-style-name="T154"><text:span text:style-name="T154"><text:s text:c="7"/></text:span><text:span text:style-name="T155">80</text:span><text:span text:style-name="T154"> <text:s text:c="23"/></text:span><text:span text:style-name="T155">[20, 80]</text:span></text:p>
      <text:p text:style-name="P30"><text:s text:c="34"/>左值 <text:s/>右值</text:p>
      <text:p text:style-name="P31" loext:marker-style-name="T154"><text:span text:style-name="T154"><text:s text:c="30"/>（小的） <text:s/>（大的）</text:span><text:span text:style-name="T154"/></text:p>
      <text:p text:style-name="P31"/>
      <text:p text:style-name="P32" loext:marker-style-name="T154"><text:span text:style-name="T154"><text:s text:c="2"/>規則：</text:span><text:span text:style-name="T180">每個節點的 左值 ≤ 右值</text:span><text:span text:style-name="T181"> </text:span><text:span text:style-name="T154">（必須成立）</text:span></text:p>
      <text:p text:style-name="P33"/>
      <text:p text:style-name="P28" loext:marker-style-name="T152"><text:span text:style-name="T182">兩個 </text:span><text:span text:style-name="T183">Heap </text:span><text:span text:style-name="T182">的同時維護</text:span><text:span text:style-name="T153">：</text:span></text:p>
      <text:list text:continue-numbering="true" text:style-name="WWNum14">
        <text:list-item>
          <text:p text:style-name="P34" loext:marker-style-name="T152"><text:span text:style-name="T166">所有節點的</text:span><text:span text:style-name="T184">左</text:span><text:span text:style-name="T166">值（</text:span><text:span text:style-name="T185">min </text:span><text:span text:style-name="T166">端）</text:span><text:span text:style-name="T153">— 自上而下形成一個 </text:span><text:span text:style-name="T186">Min Heap</text:span></text:p>
        </text:list-item>
        <text:list-item>
          <text:p text:style-name="P34" loext:marker-style-name="T152"><text:span text:style-name="T166">所有節點的</text:span><text:span text:style-name="T187">右</text:span><text:span text:style-name="T166">值（</text:span><text:span text:style-name="T185">max </text:span><text:span text:style-name="T166">端</text:span><text:span text:style-name="T153">）— 自上而下形成一個 </text:span><text:span text:style-name="T188">Max Heap</text:span></text:p>
        </text:list-item>
      </text:list>
      <text:p text:style-name="P3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3" loext:marker-style-name="T162"><text:span text:style-name="T162">Interval Heap = </text:span><text:span text:style-name="T189">Min Heap</text:span><text:span text:style-name="T190">（左值）</text:span><text:span text:style-name="T162">+</text:span><text:span text:style-name="T188"> Max Heap</text:span><text:span text:style-name="T191">（右值）</text:span><text:span text:style-name="T192">同時疊在一棵樹上</text:span></text:p>
          </table:table-cell>
        </table:table-row>
      </table:table>
      <text:p text:style-name="P36"/>
      <text:h text:style-name="P27" text:outline-level="2" loext:marker-style-name="T147"><text:span text:style-name="T147">7-4 <text:s/></text:span><text:span text:style-name="T148">整棵樹的結構解析</text:span></text:h>
      <text:p text:style-name="P29" loext:marker-style-name="T154"><text:span text:style-name="T154"><text:s text:c="14"/>[</text:span><text:span text:style-name="T179">10</text:span><text:span text:style-name="T154">, </text:span><text:span text:style-name="T193">100</text:span><text:span text:style-name="T154">] <text:s text:c="9"/>← Root</text:span></text:p>
      <text:p text:style-name="P31" loext:marker-style-name="T154"><text:span text:style-name="T154"><text:s text:c="13"/>/ <text:s text:c="9"/>\</text:span><text:span text:style-name="T154"/></text:p>
      <text:p text:style-name="P32" loext:marker-style-name="T154"><text:soft-page-break/><text:span text:style-name="T154"><text:s text:c="8"/>[</text:span><text:span text:style-name="T179">20</text:span><text:span text:style-name="T154">, </text:span><text:span text:style-name="T193">80</text:span><text:span text:style-name="T154">] <text:s text:c="5"/>[</text:span><text:span text:style-name="T179">30</text:span><text:span text:style-name="T154">, </text:span><text:span text:style-name="T193">90</text:span><text:span text:style-name="T154">]</text:span></text:p>
      <text:p text:style-name="P33"/>
      <text:p text:style-name="P28" loext:marker-style-name="T152"><text:span text:style-name="T153">拆開來看左右兩個 </text:span><text:span text:style-name="T152">Heap</text:span><text:span text:style-name="T153">：</text:span></text:p>
      <text:p text:style-name="P29" loext:marker-style-name="T154"><text:span text:style-name="T154"><text:s text:c="2"/></text:span><text:span text:style-name="T194">左值（min 端）形成 Min Heap</text:span><text:span text:style-name="T154">： <text:s text:c="2"/></text:span><text:span text:style-name="T195">右值（max 端）形成 Max Heap</text:span><text:span text:style-name="T154">：</text:span></text:p>
      <text:p text:style-name="P31"/>
      <text:p text:style-name="P31" loext:marker-style-name="T154"><text:span text:style-name="T154"><text:s text:c="10"/>10 <text:s text:c="30"/>100</text:span><text:span text:style-name="T154"/></text:p>
      <text:p text:style-name="P31" loext:marker-style-name="T154"><text:span text:style-name="T154"><text:s text:c="9"/>/ <text:s/>\ <text:s text:c="28"/>/ <text:s text:c="3"/>\</text:span><text:span text:style-name="T154"/></text:p>
      <text:p text:style-name="P31" loext:marker-style-name="T154"><text:span text:style-name="T154"><text:s text:c="8"/>20 <text:s/>30 <text:s text:c="26"/>80 <text:s text:c="4"/>90</text:span><text:span text:style-name="T154"/></text:p>
      <text:p text:style-name="P31"/>
      <text:p text:style-name="P32" loext:marker-style-name="T154"><text:span text:style-name="T154"><text:s text:c="2"/>驗證 Min Heap：10 ≤ 20 ✓ <text:s/>10 ≤ 30 ✓ <text:s text:c="2"/>驗證 Max Heap：100 ≥ 80 ✓ <text:s/>100 ≥ 90 ✓</text:span><text:span text:style-name="T154"/></text:p>
      <text:p text:style-name="P33"/>
      <text:p text:style-name="P28" loext:marker-style-name="T152"><text:span text:style-name="T153">因此：</text:span><text:span text:style-name="T152"/></text:p>
      <text:list text:continue-numbering="true" text:style-name="WWNum14">
        <text:list-item>
          <text:p text:style-name="P34" loext:marker-style-name="T152"><text:span text:style-name="T185">Root </text:span><text:span text:style-name="T166">的</text:span><text:span text:style-name="T184">左</text:span><text:span text:style-name="T166">值</text:span><text:span text:style-name="T153"> </text:span><text:span text:style-name="T152">= </text:span><text:span text:style-name="T196">Min</text:span><text:span text:style-name="T152"> Heap </text:span><text:span text:style-name="T153">的 </text:span><text:span text:style-name="T152">Root = </text:span><text:span text:style-name="T197">全域最小值</text:span><text:span text:style-name="T153"> </text:span><text:span text:style-name="T152">= 10 <text:s/>→</text:span><text:span text:style-name="T198"> <text:s/>Find-Min = O(1)</text:span></text:p>
        </text:list-item>
        <text:list-item>
          <text:p text:style-name="P34" loext:marker-style-name="T152"><text:span text:style-name="T185">Root </text:span><text:span text:style-name="T166">的</text:span><text:span text:style-name="T187">右</text:span><text:span text:style-name="T166">值</text:span><text:span text:style-name="T153"> </text:span><text:span text:style-name="T152">= </text:span><text:span text:style-name="T199">Max</text:span><text:span text:style-name="T152"> Heap </text:span><text:span text:style-name="T153">的 </text:span><text:span text:style-name="T152">Root = </text:span><text:span text:style-name="T200">全域最大值</text:span><text:span text:style-name="T153"> </text:span><text:span text:style-name="T152">= 100 <text:s/>→ </text:span><text:span text:style-name="T198"><text:s/>Find-Max = O(1)</text:span></text:p>
        </text:list-item>
      </text:list>
      <text:p text:style-name="P33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3" loext:marker-style-name="T162"><text:span text:style-name="T162">🎯 Interval Heap </text:span><text:span text:style-name="T163">的核心價值</text:span></text:p>
            <text:p text:style-name="P33" loext:marker-style-name="T164"><text:span text:style-name="T201">Root </text:span><text:span text:style-name="T202">節點</text:span><text:span text:style-name="T170">同時持有全域最小值（左值）和全域最大值（右值）</text:span><text:span text:style-name="T165">，</text:span></text:p>
            <text:p text:style-name="P35" loext:marker-style-name="T164"><text:span text:style-name="T203">無論取哪一端</text:span><text:span text:style-name="T165">，</text:span><text:span text:style-name="T161">都能 </text:span><text:span text:style-name="T174">O(1) </text:span><text:span text:style-name="T161">找到、</text:span><text:span text:style-name="T204">O(log n) </text:span><text:span text:style-name="T205">取出</text:span><text:span text:style-name="T161">。</text:span></text:p>
          </table:table-cell>
        </table:table-row>
      </table:table>
      <text:p text:style-name="P36"/>
      <text:h text:style-name="P6" text:outline-level="2" loext:marker-style-name="T13"><text:span text:style-name="T14">7-4.5 <text:s/></text:span><text:span text:style-name="T206">Find 找到 vs. Extract 取出</text:span><text:span text:style-name="T14">：</text:span><text:span text:style-name="T207">為何一個 O(1)、一個 O(log n)</text:span><text:span text:style-name="T14">？</text:span></text:h>
      <text:p text:style-name="P5" loext:marker-style-name="T208"><text:span text:style-name="T209">這是很多人第一次接觸 Heap 時最容易混淆的地方。關鍵在於：</text:span><text:span text:style-name="T210">「找到（Find/Peek）」和「取出（Extract/Delete）」是完全不同的兩件事。</text:span></text:p>
      <text:p text:style-name="P3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211">先用普通 Max Heap 建立直覺</text:span><text:span text:style-name="T27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 loext:marker-style-name="T22"><text:span text:style-name="T23"><text:s text:c="2"/>→ </text:span><text:span text:style-name="T60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</text:span><text:span text:style-name="T212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</text:span><text:span text:style-name="T213">Heap Property（父 ≥ 子）不能違反</text:span></text:p>
          </table:table-cell>
        </table:table-row>
      </table:table>
      <text:p text:style-name="P36"/>
      <text:p text:style-name="P5" loext:marker-style-name="T208"><text:span text:style-name="T214">「取出」的代價遠比「找到」高，是因為</text:span><text:span text:style-name="T215">刪除 Root 後必須完整修復整棵樹的結構。</text:span><text:span text:style-name="T209">流程如下：</text:span></text:p>
      <text:p text:style-name="P3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37">最壞情況需走完整棵樹的高度 h = log₂n</text:span><text:span text:style-name="T23">，因此 </text:span><text:span text:style-name="T81">O(log n)</text:span><text:span text:style-name="T23">。</text:span></text:p>
          </table:table-cell>
        </table:table-row>
      </table:table>
      <text:p text:style-name="P3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211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</text:span><text:span text:style-name="T26">Extract</text:span><text:span text:style-name="T23"> = </text:span><text:span text:style-name="T216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1"/></text:span><text:span text:style-name="T60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</text:span><text:span text:style-name="T38">這個「整理」的工作量才是 O(log n) 的真正來源。</text:span></text:p>
          </table:table-cell>
        </table:table-row>
      </table:table>
      <text:p text:style-name="P36"/>
      <text:h text:style-name="P6" text:outline-level="2" loext:marker-style-name="T13"><text:span text:style-name="T14">7-4.6 <text:s/>Interval Heap 的 Extract-Min 與 Extract-Max 完整示範</text:span><text:span text:style-name="T13"/></text:h>
      <text:p text:style-name="P5" loext:marker-style-name="T208"><text:span text:style-name="T217">Interval Heap 的 Extract 操作，本質上就是普通 Heap 的 Heapify Down</text:span><text:span text:style-name="T209">，只是</text:span><text:span text:style-name="T218">同時維護 Min 端和 Max 端兩條性質</text:span><text:span text:style-name="T209">。以下用同一棵初始樹，分別展示兩種操作。</text:span></text:p>
      <text:p text:style-name="P3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211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36"/>
      <text:h text:style-name="P6" text:outline-level="2" loext:marker-style-name="T13"><text:span text:style-name="T14"><text:s text:c="2"/>一、Extract-Min（</text:span><text:span text:style-name="T219">取出最小值 10</text:span><text:span text:style-name="T14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</text:span><text:span text:style-name="T220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</text:span><text:span text:style-name="T121">30 &gt; 20 → 違反 Min Heap（父 ≤ 子）</text:span><text:span text:style-name="T23">→ </text:span><text:span text:style-name="T93">交換 min 端</text:span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</text:span><text:span text:style-name="T60">Min Heap 與 Max Heap 性質皆完整恢復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二、Extract-Max（</text:span><text:span text:style-name="T219">取出最大值 100</text:span><text:span text:style-name="T14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</text:span><text:span text:style-name="T220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</text:span><text:span text:style-name="T60">結構完整</text:span><text:span text:style-name="T23">。</text:span></text:p>
          </table:table-cell>
        </table:table-row>
      </table:table>
      <text:p text:style-name="P36"/>
      <text:h text:style-name="P6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208"><text:span text:style-name="T209">上例的 Max Heap 恰好不需要下沉。以下補充一個「確實需要多次下沉」的案例，更能體現 O(log n) 的代價：</text:span><text:span text:style-name="T208"/></text:p>
      <text:p text:style-name="P3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3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211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21"><text:s text:c="2"/>Extract-Min <text:s text:c="7"/>O(log n) <text:s text:c="9"/></text:span><text:span text:style-name="T222">O(n) </text:span><text:span text:style-name="T221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37"><text:span text:style-name="T221"><text:s text:c="2"/>Extract-Max <text:s text:c="7"/>O(log n) <text:s text:c="9"/>O(log n) <text:s text:c="8"/></text:span><text:span text:style-name="T223">O(n)</text:span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38">Interval Heap 的兩個 Extract 都是 O(log n)</text:span><text:span text:style-name="T23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24">Extract 要 O(log n) </text:span><text:span text:style-name="T23">是因為</text:span><text:span text:style-name="T81">刪除後必須 Heapify Down 修復結構</text:span><text:span text:style-name="T23">。</text:span></text:p>
          </table:table-cell>
        </table:table-row>
      </table:table>
      <text:p text:style-name="P3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</text:span><text:span text:style-name="T76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</text:span><text:span text:style-name="T225">刪除後最後元素補位</text:span><text:span text:style-name="T23">，再 Heapify Down 重建性質，</text:span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</text:span><text:span text:style-name="T60">Extract = 拿走，要整理 → O(log n)</text:span><text:span text:style-name="T23">。</text:span></text:p>
          </table:table-cell>
        </table:table-row>
      </table:table>
      <text:p text:style-name="P36"/>
      <text:p text:style-name="P36"/>
      <text:h text:style-name="P27" text:outline-level="2" loext:marker-style-name="T147"><text:span text:style-name="T147">7-5 <text:s/></text:span><text:span text:style-name="T148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26"><text:span text:style-name="T227">操作</text:span><text:span text:style-name="T226"/></text:p>
          </table:table-cell>
          <table:table-cell table:style-name="表格39.A1" office:value-type="string">
            <text:p text:style-name="Standard" loext:marker-style-name="T226"><text:span text:style-name="T226">Interval Heap</text:span><text:span text:style-name="T226"/></text:p>
          </table:table-cell>
          <table:table-cell table:style-name="表格39.A1" office:value-type="string">
            <text:p text:style-name="Standard" loext:marker-style-name="T226"><text:span text:style-name="T227">普通 </text:span><text:span text:style-name="T226">Max Heap</text:span></text:p>
          </table:table-cell>
          <table:table-cell table:style-name="表格39.A1" office:value-type="string">
            <text:p text:style-name="Standard" loext:marker-style-name="T226"><text:span text:style-name="T227">普通 </text:span><text:span text:style-name="T226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8"><text:span text:style-name="T228">Find-Min</text:span><text:span text:style-name="T229">（找最小值）</text:span></text:p>
          </table:table-cell>
          <table:table-cell table:style-name="表格39.A2" office:value-type="string">
            <text:p text:style-name="Standard" loext:marker-style-name="T228"><text:span text:style-name="T228">O(1) ★</text:span><text:span text:style-name="T228"/></text:p>
          </table:table-cell>
          <table:table-cell table:style-name="表格39.A2" office:value-type="string">
            <text:p text:style-name="Standard" loext:marker-style-name="T228"><text:span text:style-name="T228">O(n)</text:span><text:span text:style-name="T228"/></text:p>
          </table:table-cell>
          <table:table-cell table:style-name="表格39.A2" office:value-type="string">
            <text:p text:style-name="Standard" loext:marker-style-name="T228"><text:span text:style-name="T228">O(1)</text:span><text:span text:style-name="T228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8"><text:span text:style-name="T228">Find-Max</text:span><text:span text:style-name="T229">（找最大值）</text:span></text:p>
          </table:table-cell>
          <table:table-cell table:style-name="表格39.A3" office:value-type="string">
            <text:p text:style-name="Standard" loext:marker-style-name="T228"><text:span text:style-name="T228">O(1) ★</text:span><text:span text:style-name="T228"/></text:p>
          </table:table-cell>
          <table:table-cell table:style-name="表格39.A3" office:value-type="string">
            <text:p text:style-name="Standard" loext:marker-style-name="T228"><text:span text:style-name="T228">O(1)</text:span><text:span text:style-name="T228"/></text:p>
          </table:table-cell>
          <table:table-cell table:style-name="表格39.A3" office:value-type="string">
            <text:p text:style-name="Standard" loext:marker-style-name="T228"><text:span text:style-name="T228">O(n)</text:span><text:span text:style-name="T228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8"><text:span text:style-name="T228">Extract-Min</text:span><text:span text:style-name="T229">（取出最小）</text:span></text:p>
          </table:table-cell>
          <table:table-cell table:style-name="表格39.A2" office:value-type="string">
            <text:p text:style-name="P38">O(log n) ★</text:p>
          </table:table-cell>
          <table:table-cell table:style-name="表格39.A2" office:value-type="string">
            <text:p text:style-name="P39">O(n)</text:p>
          </table:table-cell>
          <table:table-cell table:style-name="表格39.A2" office:value-type="string">
            <text:p text:style-name="Standard" loext:marker-style-name="T228"><text:span text:style-name="T228">O(log n)</text:span><text:span text:style-name="T228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8"><text:span text:style-name="T228">Extract-Max</text:span><text:span text:style-name="T229">（取出最大）</text:span></text:p>
          </table:table-cell>
          <table:table-cell table:style-name="表格39.A3" office:value-type="string">
            <text:p text:style-name="P38">O(log n) ★</text:p>
          </table:table-cell>
          <table:table-cell table:style-name="表格39.A3" office:value-type="string">
            <text:p text:style-name="Standard" loext:marker-style-name="T228"><text:span text:style-name="T228">O(log n)</text:span><text:span text:style-name="T228"/></text:p>
          </table:table-cell>
          <table:table-cell table:style-name="表格39.A3" office:value-type="string">
            <text:p text:style-name="P39">O(n)</text:p>
          </table:table-cell>
        </table:table-row>
      </table:table>
      <text:p text:style-name="P28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33" loext:marker-style-name="T162"><text:span text:style-name="T162">⚠️ <text:s/></text:span><text:span text:style-name="T163">普通 </text:span><text:span text:style-name="T162">Min/Max Heap </text:span><text:span text:style-name="T163">各有盲點：</text:span></text:p>
            <text:p text:style-name="P33" loext:marker-style-name="T164"><text:span text:style-name="T159">普通 </text:span><text:span text:style-name="T160">Max Heap </text:span><text:span text:style-name="T159">找最小值 </text:span><text:span text:style-name="T165">→ </text:span><text:span text:style-name="T185">O(n)</text:span><text:span text:style-name="T166">（要掃整棵樹）</text:span></text:p>
            <text:p text:style-name="P33" loext:marker-style-name="T164"><text:span text:style-name="T230">普通 </text:span><text:span text:style-name="T231">Min Heap </text:span><text:span text:style-name="T230">找最大值 </text:span><text:span text:style-name="T165">→ </text:span><text:span text:style-name="T185">O(n)</text:span><text:span text:style-name="T166">（同理）</text:span></text:p>
            <text:p text:style-name="P35" loext:marker-style-name="T164"><text:span text:style-name="T174">Interval Heap </text:span><text:span text:style-name="T161">解決此問題，兩端操作都達到 </text:span><text:span text:style-name="T174">O(log n)</text:span><text:span text:style-name="T165">，這是其最大優勢。</text:span></text:p>
          </table:table-cell>
        </table:table-row>
      </table:table>
      <text:p text:style-name="P36"/>
      <text:h text:style-name="P27" text:outline-level="2" loext:marker-style-name="T147"><text:span text:style-name="T147">7-6 <text:s/>Insert </text:span><text:span text:style-name="T148">操作示範（插入 </text:span><text:span text:style-name="T147">5</text:span><text:span text:style-name="T148">）</text:span></text:h>
      <text:p text:style-name="P28" loext:marker-style-name="T152"><text:span text:style-name="T153">以下示範將數字 </text:span><text:span text:style-name="T152">5 </text:span><text:span text:style-name="T153">插入含 </text:span><text:span text:style-name="T152">{10, 100}, {20, 80}, {30, 90} </text:span><text:span text:style-name="T153">的 </text:span><text:span text:style-name="T152">Interval Heap</text:span><text:span text:style-name="T153">：</text:span></text:p>
      <text:p text:style-name="P29" loext:marker-style-name="T154"><text:span text:style-name="T154">初始： <text:s text:c="10"/>[10, 100]</text:span><text:span text:style-name="T154"/></text:p>
      <text:p text:style-name="P31" loext:marker-style-name="T154"><text:span text:style-name="T154"><text:s text:c="18"/>/ <text:s text:c="7"/>\</text:span><text:span text:style-name="T154"/></text:p>
      <text:p text:style-name="P31" loext:marker-style-name="T154"><text:span text:style-name="T154"><text:s text:c="13"/>[20, 80] <text:s text:c="2"/>[30, 90]</text:span><text:span text:style-name="T154"/></text:p>
      <text:p text:style-name="P31"/>
      <text:p text:style-name="P31" loext:marker-style-name="T154"><text:span text:style-name="T154">Step 1：</text:span><text:span text:style-name="T155">新葉 [5, 5] </text:span><text:span text:style-name="T154">接在 [20, 80] 左子位置</text:span></text:p>
      <text:p text:style-name="P31" loext:marker-style-name="T154"><text:span text:style-name="T154"><text:s text:c="13"/>[10, 100]</text:span><text:span text:style-name="T154"/></text:p>
      <text:p text:style-name="P31" loext:marker-style-name="T154"><text:span text:style-name="T154"><text:s text:c="14"/>/ <text:s text:c="7"/>\</text:span><text:span text:style-name="T154"/></text:p>
      <text:p text:style-name="P31" loext:marker-style-name="T154"><text:span text:style-name="T154"><text:s text:c="9"/>[20, 80] <text:s text:c="2"/>[30, 90]</text:span><text:span text:style-name="T154"/></text:p>
      <text:p text:style-name="P31" loext:marker-style-name="T154"><text:span text:style-name="T154"><text:s text:c="14"/>/</text:span><text:span text:style-name="T154"/></text:p>
      <text:p text:style-name="P31" loext:marker-style-name="T154"><text:span text:style-name="T154"><text:s text:c="11"/>[5, 5] <text:s text:c="2"/>← </text:span><text:span text:style-name="T232">5 &lt; parent.min(20)</text:span><text:span text:style-name="T154">，</text:span><text:span text:style-name="T233">min 端需上浮</text:span></text:p>
      <text:p text:style-name="P31"/>
      <text:p text:style-name="P31" loext:marker-style-name="T154"><text:span text:style-name="T154">Step 2：</text:span><text:span text:style-name="T193">交換 min 端 → [20,80]→[5,80]</text:span><text:span text:style-name="T154">，</text:span><text:span text:style-name="T233">葉→[20,20]</text:span></text:p>
      <text:p text:style-name="P31" loext:marker-style-name="T154"><text:span text:style-name="T154"><text:s text:c="13"/>[10, 100]</text:span><text:span text:style-name="T154"/></text:p>
      <text:p text:style-name="P31" loext:marker-style-name="T154"><text:span text:style-name="T154"><text:s text:c="14"/>/ <text:s text:c="7"/>\</text:span><text:span text:style-name="T154"/></text:p>
      <text:p text:style-name="P31" loext:marker-style-name="T154"><text:span text:style-name="T154"><text:s text:c="10"/>[5, 80] <text:s text:c="2"/>[30, 90] <text:s text:c="2"/>← </text:span><text:span text:style-name="T232">5 &lt; Root.min(10)</text:span><text:span text:style-name="T154">，</text:span><text:span text:style-name="T233">繼續上浮</text:span></text:p>
      <text:p text:style-name="P31" loext:marker-style-name="T154"><text:span text:style-name="T154"><text:s text:c="14"/>/</text:span><text:span text:style-name="T154"/></text:p>
      <text:p text:style-name="P31" loext:marker-style-name="T154"><text:span text:style-name="T154"><text:s text:c="10"/>[20, 20]</text:span><text:span text:style-name="T154"/></text:p>
      <text:p text:style-name="P31"/>
      <text:p text:style-name="P31" loext:marker-style-name="T154"><text:span text:style-name="T154">Step 3：</text:span><text:span text:style-name="T193">交換 min 端 → Root[10,100]→[5,100]</text:span><text:span text:style-name="T154">，</text:span><text:span text:style-name="T233">[5,80]→[10,80]</text:span></text:p>
      <text:p text:style-name="P31"/>
      <text:p text:style-name="P31" loext:marker-style-name="T154"><text:span text:style-name="T154">最終： <text:s text:c="10"/>[5, 100] <text:s text:c="2"/>← </text:span><text:span text:style-name="T234">全域最小值已更新</text:span></text:p>
      <text:p text:style-name="P31" loext:marker-style-name="T154"><text:span text:style-name="T154"><text:s text:c="18"/>/ <text:s text:c="7"/>\</text:span><text:span text:style-name="T154"/></text:p>
      <text:p text:style-name="P31" loext:marker-style-name="T154"><text:span text:style-name="T154"><text:s text:c="13"/>[10, 80] <text:s text:c="2"/>[30, 90]</text:span><text:span text:style-name="T154"/></text:p>
      <text:p text:style-name="P31" loext:marker-style-name="T154"><text:span text:style-name="T154"><text:s text:c="18"/>/</text:span><text:span text:style-name="T154"/></text:p>
      <text:p text:style-name="P32" loext:marker-style-name="T154"><text:span text:style-name="T154"><text:s text:c="13"/>[20, 20]</text:span><text:span text:style-name="T154"/></text:p>
      <text:p text:style-name="P33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3" loext:marker-style-name="T162"><text:span text:style-name="T162">Insert </text:span><text:span text:style-name="T163">規則：</text:span></text:p>
            <text:p text:style-name="P33" loext:marker-style-name="T164"><text:span text:style-name="T165">新值 </text:span><text:span text:style-name="T164">&lt; </text:span><text:span text:style-name="T165">父節點左值（</text:span><text:span text:style-name="T164">min</text:span><text:span text:style-name="T165">）→ 交換左值，繼續往上（</text:span><text:span text:style-name="T164">min </text:span><text:span text:style-name="T165">端上浮）</text:span></text:p>
            <text:p text:style-name="P33" loext:marker-style-name="T164"><text:span text:style-name="T165">新值 </text:span><text:span text:style-name="T164">&gt; </text:span><text:span text:style-name="T165">父節點右值（</text:span><text:span text:style-name="T164">max</text:span><text:span text:style-name="T165">）→ 交換右值，繼續往上（</text:span><text:span text:style-name="T164">max </text:span><text:span text:style-name="T165">端上浮）</text:span></text:p>
            <text:p text:style-name="P40"><text:span text:style-name="T235">新值介於父節點 </text:span><text:span text:style-name="T236">[min, max] </text:span><text:span text:style-name="T235">之間 → 合法，停止</text:span></text:p>
          </table:table-cell>
        </table:table-row>
      </table:table>
      <text:h text:style-name="P26" text:outline-level="1"><text:span text:style-name="T146">八、合併兩個 </text:span><text:span text:style-name="T145">Heap</text:span><text:span text:style-name="T146">（</text:span><text:span text:style-name="T145">Merge Heap</text:span><text:span text:style-name="T146">）【</text:span><text:span text:style-name="T145">111</text:span><text:span text:style-name="T146">地</text:span><text:span text:style-name="T145">Q4</text:span><text:span text:style-name="T146">】</text:span></text:h>
      <text:p text:style-name="P28" loext:marker-style-name="T152"><text:span text:style-name="T153">這一章看起來很多，其實從頭到尾只在回答 </text:span></text:p>
      <table:table table:name="表格M1" table:style-name="表格M1">
        <table:table-column table:style-name="表格M1.A"/>
        <table:table-row table:style-name="表格M1.1">
          <table:table-cell table:style-name="表格M1.A1" office:value-type="string">
            <text:p text:style-name="P35" loext:marker-style-name="T162"><text:span text:style-name="T163">一個問題：如果有兩個 Heap，要怎麼「快速」合併成一個？</text:span></text:p>
          </table:table-cell>
        </table:table-row>
      </table:table>
      <text:p text:style-name="P28" loext:marker-style-name="T152"><text:soft-page-break/><text:span text:style-name="T153">把這句話記在心裡，下面每一段都是為了回答它。</text:span></text:p>
      <text:p text:style-name="P36"/>
      <text:h text:style-name="P27" text:outline-level="2" loext:marker-style-name="T147"><text:span text:style-name="T147">8-1 <text:s/></text:span><text:span text:style-name="T148">先看普通 Binary Heap 怎麼合併（為什麼會慢）</text:span></text:h>
      <text:p text:style-name="P28" loext:marker-style-name="T152"><text:span text:style-name="T153">假設你有兩個 </text:span><text:span text:style-name="T152">Max Heap A</text:span><text:span text:style-name="T153"> 和 </text:span><text:span text:style-name="T152">B</text:span><text:span text:style-name="T153">，想把它們併成一個新的 Max Heap：</text:span></text:p>
      <text:p text:style-name="P29" loext:marker-style-name="T154"><text:span text:style-name="T154"><text:s text:c="3"/>Heap A： <text:s text:c="9"/>Heap B：</text:span><text:span text:style-name="T154"/></text:p>
      <text:p text:style-name="P31" loext:marker-style-name="T154"><text:span text:style-name="T154"><text:s text:c="6"/>90 <text:s text:c="15"/>95</text:span><text:span text:style-name="T154"/></text:p>
      <text:p text:style-name="P31" loext:marker-style-name="T154"><text:span text:style-name="T154"><text:s text:c="5"/>/ <text:s/>\ <text:s text:c="13"/>/ <text:s/>\</text:span><text:span text:style-name="T154"/></text:p>
      <text:p text:style-name="P32" loext:marker-style-name="T154"><text:span text:style-name="T154"><text:s text:c="4"/>70 <text:s text:c="2"/>80 <text:s text:c="10"/>60 <text:s text:c="2"/>50</text:span><text:span text:style-name="T154"/></text:p>
      <text:p text:style-name="P28" loext:marker-style-name="T152"><text:span text:style-name="T162">你的第一個直覺，大概是這樣做：</text:span></text:p>
      <text:p text:style-name="P29" loext:marker-style-name="T154"><text:span text:style-name="T154"><text:s text:c="2"/>Step1 <text:s/>把兩棵全部「倒出來」</text:span><text:span text:style-name="T154"/></text:p>
      <text:p text:style-name="P31" loext:marker-style-name="T154"><text:span text:style-name="T154"><text:s text:c="9"/>90 70 80 95 60 50</text:span><text:span text:style-name="T154"/></text:p>
      <text:p text:style-name="P30"/>
      <text:p text:style-name="P31" loext:marker-style-name="T154"><text:span text:style-name="T154"><text:s text:c="2"/>Step2 <text:s/>重新 Build Heap（Bottom-Up）</text:span><text:span text:style-name="T154"/></text:p>
      <text:p text:style-name="P31" loext:marker-style-name="T154"><text:span text:style-name="T154"><text:s text:c="16"/>95</text:span><text:span text:style-name="T154"/></text:p>
      <text:p text:style-name="P31" loext:marker-style-name="T154"><text:span text:style-name="T154"><text:s text:c="15"/>/ <text:s/>\</text:span><text:span text:style-name="T154"/></text:p>
      <text:p text:style-name="P31" loext:marker-style-name="T154"><text:span text:style-name="T154"><text:s text:c="13"/>90 <text:s text:c="3"/>80</text:span><text:span text:style-name="T154"/></text:p>
      <text:p text:style-name="P31" loext:marker-style-name="T154"><text:span text:style-name="T154"><text:s text:c="12"/>/ <text:s/>\ <text:s text:c="2"/>/</text:span><text:span text:style-name="T154"/></text:p>
      <text:p text:style-name="P32" loext:marker-style-name="T154"><text:span text:style-name="T154"><text:s text:c="11"/>70 <text:s/>60 50</text:span><text:span text:style-name="T154"/></text:p>
      <text:p text:style-name="P28" loext:marker-style-name="T152"><text:span text:style-name="T153">這就是普通 </text:span><text:span text:style-name="T174">Binary Heap</text:span><text:span text:style-name="T153"> 的作法：全部元素重新整理一次。時間是 </text:span><text:span text:style-name="T237">O(n+m)</text:span><text:span text:style-name="T153">（n、m 是兩個 Heap 的大小）。</text:span></text:p>
      <table:table table:name="表格M2" table:style-name="表格M2">
        <table:table-column table:style-name="表格M2.A"/>
        <table:table-row table:style-name="表格M2.1">
          <table:table-cell table:style-name="表格M2.A1" office:value-type="string">
            <text:p text:style-name="P33" loext:marker-style-name="T162"><text:span text:style-name="T162">❓ </text:span><text:span text:style-name="T185">單次來看 O(n+m) 其實還好，問題出在哪？</text:span></text:p>
            <text:p text:style-name="P33" loext:marker-style-name="T164"><text:span text:style-name="T165">麻煩的是有些系統「一天要合併幾十萬次」，例如：</text:span></text:p>
            <text:p text:style-name="P33" loext:marker-style-name="T164"><text:span text:style-name="T165">• 事件驅動模擬（Event-driven Simulation）</text:span></text:p>
            <text:p text:style-name="P33" loext:marker-style-name="T164"><text:span text:style-name="T165">• 作業系統排程器（Scheduler）</text:span></text:p>
            <text:p text:style-name="P35" loext:marker-style-name="T164"><text:span text:style-name="T165">• 分散式工作佇列（Distributed Job Queue）</text:span></text:p>
          </table:table-cell>
        </table:table-row>
      </table:table>
      <text:p text:style-name="P28" loext:marker-style-name="T152"><text:span text:style-name="T153">想像一直 Merge：A+B→C，C+D→E，E+F→… 一路併下去。每次都 </text:span><text:span text:style-name="T237">O(n+m)</text:span><text:span text:style-name="T153">，就太慢了。於是有人問：能不能「不要每次都重建」？</text:span></text:p>
      <text:p text:style-name="P36"/>
      <text:h text:style-name="P27" text:outline-level="2" loext:marker-style-name="T147"><text:span text:style-name="T147">8-2 <text:s/></text:span><text:span text:style-name="T148">Leftist Heap 的核心想法：Merge 只走右邊</text:span></text:h>
      <text:p text:style-name="P28" loext:marker-style-name="T152"><text:span text:style-name="T153">為了讓 Merge 變快，有人發明了 </text:span><text:span text:style-name="T174">Leftist Heap</text:span><text:span text:style-name="T153">（</text:span><text:span text:style-name="T173">左偏堆</text:span><text:span text:style-name="T153">）。先講清楚一件最容易誤會的事：</text:span></text:p>
      <table:table table:name="表格M3" table:style-name="表格M3">
        <table:table-column table:style-name="表格M3.A"/>
        <table:table-row table:style-name="表格M3.1">
          <table:table-cell table:style-name="表格M3.A1" office:value-type="string">
            <text:p text:style-name="P33" loext:marker-style-name="T162"><text:span text:style-name="T170">Leftist Heap 唯一的目的，就是「讓 Merge 很快」</text:span><text:span text:style-name="T163">。</text:span></text:p>
            <text:p text:style-name="P35" loext:marker-style-name="T164"><text:span text:style-name="T165">不是 Insert 更快、不是 Delete 更快——就只是 </text:span><text:span text:style-name="T166">Merge 很快</text:span><text:span text:style-name="T165">。</text:span></text:p>
          </table:table-cell>
        </table:table-row>
      </table:table>
      <text:p text:style-name="P28" loext:marker-style-name="T152"><text:span text:style-name="T162">那它怎麼做到的？整章最重要的一句話：</text:span></text:p>
      <table:table table:name="表格M4" table:style-name="表格M4">
        <table:table-column table:style-name="表格M4.A"/>
        <table:table-row table:style-name="表格M4.1">
          <table:table-cell table:style-name="表格M4.A1" office:value-type="string">
            <text:p text:style-name="P35" loext:marker-style-name="T162"><text:span text:style-name="T204">Merge</text:span><text:span text:style-name="T205"> 只走右邊：Root → 右 → 右 → 右</text:span></text:p>
          </table:table-cell>
        </table:table-row>
      </table:table>
      <text:p text:style-name="P28" loext:marker-style-name="T152"><text:span text:style-name="T153">不是整棵樹、不是 DFS、也不是 BFS。Merge 只會沿著「最右邊那條路」往下走。例如：</text:span></text:p>
      <text:p text:style-name="P29" loext:marker-style-name="T154"><text:span text:style-name="T154"><text:s text:c="8"/>3</text:span><text:span text:style-name="T154"/></text:p>
      <text:p text:style-name="P31" loext:marker-style-name="T154"><text:span text:style-name="T154"><text:s text:c="7"/>/ \</text:span><text:span text:style-name="T154"/></text:p>
      <text:p text:style-name="P31" loext:marker-style-name="T154"><text:soft-page-break/><text:span text:style-name="T154"><text:s text:c="6"/>5 <text:s text:c="2"/>8 <text:s text:c="7"/></text:span><text:span text:style-name="T238">Merge 只會碰到：</text:span></text:p>
      <text:p text:style-name="P31" loext:marker-style-name="T154"><text:span text:style-name="T154"><text:s text:c="11"/>\ <text:s text:c="6"/></text:span><text:span text:style-name="T238">3 → 8 → 9 → 12</text:span></text:p>
      <text:p text:style-name="P31" loext:marker-style-name="T154"><text:span text:style-name="T154"><text:s text:c="12"/>9</text:span><text:span text:style-name="T154"/></text:p>
      <text:p text:style-name="P31" loext:marker-style-name="T154"><text:span text:style-name="T154"><text:s text:c="13"/>\ <text:s text:c="4"/></text:span><text:span text:style-name="T239">左邊的 5 完全不動！</text:span></text:p>
      <text:p text:style-name="P32" loext:marker-style-name="T154"><text:span text:style-name="T154"><text:s text:c="13"/>12</text:span><text:span text:style-name="T154"/></text:p>
      <text:p text:style-name="P28" loext:marker-style-name="T152"><text:span text:style-name="T153">既然只走右邊，那</text:span><text:span text:style-name="T161">「右邊有多長」就決定了 Merge 有多快</text:span><text:span text:style-name="T153">。可是</text:span><text:span text:style-name="T240">如果右邊很長呢？</text:span></text:p>
      <text:p text:style-name="P29" loext:marker-style-name="T154"><text:span text:style-name="T154"><text:s text:c="3"/>3</text:span><text:span text:style-name="T154"/></text:p>
      <text:p text:style-name="P31" loext:marker-style-name="T154"><text:span text:style-name="T154"><text:s text:c="4"/>\</text:span><text:span text:style-name="T154"/></text:p>
      <text:p text:style-name="P31" loext:marker-style-name="T154"><text:span text:style-name="T154"><text:s text:c="5"/>4</text:span><text:span text:style-name="T154"/></text:p>
      <text:p text:style-name="P31" loext:marker-style-name="T154"><text:span text:style-name="T154"><text:s text:c="6"/>\</text:span><text:span text:style-name="T154"/></text:p>
      <text:p text:style-name="P31" loext:marker-style-name="T154"><text:span text:style-name="T154"><text:s text:c="7"/>5 <text:s text:c="5"/>右側路徑 = 5 步</text:span><text:span text:style-name="T154"/></text:p>
      <text:p text:style-name="P31" loext:marker-style-name="T154"><text:span text:style-name="T154"><text:s text:c="8"/>\ <text:s text:c="4"/>→ Merge 退化成 O(n) <text:s/>✗</text:span><text:span text:style-name="T154"/></text:p>
      <text:p text:style-name="P31" loext:marker-style-name="T154"><text:span text:style-name="T154"><text:s text:c="9"/>6</text:span><text:span text:style-name="T154"/></text:p>
      <text:p text:style-name="P31" loext:marker-style-name="T154"><text:span text:style-name="T154"><text:s text:c="10"/>\</text:span><text:span text:style-name="T154"/></text:p>
      <text:p text:style-name="P32" loext:marker-style-name="T154"><text:span text:style-name="T154"><text:s text:c="11"/>7</text:span><text:span text:style-name="T154"/></text:p>
      <text:p text:style-name="P28" loext:marker-style-name="T152"><text:span text:style-name="T153">所以 </text:span><text:span text:style-name="T175">Leftist Heap 的招數就是一句話：</text:span></text:p>
      <table:table table:name="表格M5" table:style-name="表格M5">
        <table:table-column table:style-name="表格M5.A"/>
        <table:table-row table:style-name="表格M5.1">
          <table:table-cell table:style-name="表格M5.A1" office:value-type="string">
            <text:p text:style-name="P41">故意讓「右邊」永遠很短。</text:p>
          </table:table-cell>
        </table:table-row>
      </table:table>
      <text:p text:style-name="P42"/>
      <text:h text:style-name="P27" text:outline-level="2" loext:marker-style-name="T147"><text:span text:style-name="T147">8-3 <text:s/></text:span><text:span text:style-name="T148">為什麼叫</text:span><text:span text:style-name="T149"> Leftist（左偏）</text:span><text:span text:style-name="T148">？</text:span></text:h>
      <text:p text:style-name="P28" loext:marker-style-name="T152"><text:span text:style-name="T153">因為</text:span><text:span text:style-name="T170">它「故意」長得左長右短：左邊可以很長，右邊一定很短</text:span><text:span text:style-name="T153">。</text:span></text:p>
      <text:p text:style-name="P29" loext:marker-style-name="T154"><text:span text:style-name="T154"><text:s text:c="3"/>左偏（Leftist，正確） <text:s text:c="7"/>右傾（不好）</text:span><text:span text:style-name="T154"/></text:p>
      <text:p text:style-name="P31" loext:marker-style-name="T154"><text:span text:style-name="T154"><text:s text:c="10"/>3 <text:s text:c="23"/>3</text:span><text:span text:style-name="T154"/></text:p>
      <text:p text:style-name="P31" loext:marker-style-name="T154"><text:span text:style-name="T154"><text:s text:c="9"/>/ <text:s text:c="25"/>\</text:span><text:span text:style-name="T154"/></text:p>
      <text:p text:style-name="P31" loext:marker-style-name="T154"><text:span text:style-name="T154"><text:s text:c="8"/>5 <text:s text:c="27"/>5</text:span><text:span text:style-name="T154"/></text:p>
      <text:p text:style-name="P31" loext:marker-style-name="T154"><text:span text:style-name="T154"><text:s text:c="7"/>/ <text:s text:c="29"/>\</text:span><text:span text:style-name="T154"/></text:p>
      <text:p text:style-name="P31" loext:marker-style-name="T154"><text:span text:style-name="T154"><text:s text:c="6"/>7 <text:s text:c="31"/>7</text:span><text:span text:style-name="T154"/></text:p>
      <text:p text:style-name="P31" loext:marker-style-name="T154"><text:span text:style-name="T154"><text:s text:c="5"/>/ <text:s text:c="33"/>\</text:span><text:span text:style-name="T154"/></text:p>
      <text:p text:style-name="P31" loext:marker-style-name="T154"><text:span text:style-name="T154"><text:s text:c="4"/>9 <text:s text:c="35"/>9</text:span><text:span text:style-name="T154"/></text:p>
      <text:p text:style-name="P30"/>
      <text:p text:style-name="P32" loext:marker-style-name="T154"><text:span text:style-name="T154"><text:s text:c="3"/></text:span><text:span text:style-name="T241">右邊只有 0 步，Merge 超快 ✓</text:span><text:span text:style-name="T154"> <text:s text:c="4"/>右邊 4 步，Merge 很慢 ✗</text:span></text:p>
      <text:p text:style-name="P28" loext:marker-style-name="T152"><text:span text:style-name="T153">「左偏」這個名字的意思就是：</text:span><text:span text:style-name="T242">樹被故意往左邊壓，把長度都丟到左邊去</text:span><text:span text:style-name="T153">，</text:span><text:span text:style-name="T163">好讓右邊保持最短</text:span><text:span text:style-name="T153">。</text:span></text:p>
      <text:p text:style-name="P36"/>
      <text:h text:style-name="P27" text:outline-level="2" loext:marker-style-name="T147"><text:span text:style-name="T147">8-4 <text:s/></text:span><text:span text:style-name="T148">NPL 是什麼鬼？（先懂它要幹嘛，再看公式）</text:span></text:h>
      <text:p text:style-name="P28" loext:marker-style-name="T152"><text:span text:style-name="T153">很多人就是死在 NPL 這裡。其實它沒那麼可怕——</text:span></text:p>
      <table:table table:name="表格M6" table:style-name="表格M6">
        <table:table-column table:style-name="表格M6.A"/>
        <table:table-row table:style-name="表格M6.1">
          <table:table-cell table:style-name="表格M6.A1" office:value-type="string">
            <text:p text:style-name="P35" loext:marker-style-name="T162"><text:span text:style-name="T243">NPL 只是一個數字，用來「量右邊會不會太長」</text:span><text:span text:style-name="T163">。</text:span></text:p>
          </table:table-cell>
        </table:table-row>
      </table:table>
      <text:p text:style-name="P28" loext:marker-style-name="T152"><text:span text:style-name="T153">先用最白話的方式感覺一下它在數什麼：</text:span></text:p>
      <text:p text:style-name="P29" loext:marker-style-name="T154"><text:span text:style-name="T154"><text:s text:c="5"/>A <text:s text:c="11"/>A <text:s text:c="13"/>A</text:span><text:span text:style-name="T154"/></text:p>
      <text:p text:style-name="P31" loext:marker-style-name="T154"><text:span text:style-name="T154"><text:s text:c="17"/>/ <text:s text:c="13"/>/ \</text:span><text:span text:style-name="T154"/></text:p>
      <text:p text:style-name="P31" loext:marker-style-name="T154"><text:span text:style-name="T154"><text:s text:c="16"/>B <text:s text:c="13"/>B <text:s text:c="2"/>C</text:span><text:span text:style-name="T154"/></text:p>
      <text:p text:style-name="P30"/>
      <text:p text:style-name="P31" loext:marker-style-name="T154"><text:span text:style-name="T154"><text:s text:c="2"/>沒有小孩 <text:s text:c="5"/>只有左邊 <text:s text:c="7"/>左右都有</text:span><text:span text:style-name="T154"/></text:p>
      <text:p text:style-name="P32" loext:marker-style-name="T154"><text:span text:style-name="T154"><text:s text:c="2"/>NPL = 0 <text:s text:c="5"/>NPL = 0 <text:s text:c="7"/>NPL = 1</text:span><text:span text:style-name="T154"/></text:p>
      <text:p text:style-name="P28" loext:marker-style-name="T152"><text:span text:style-name="T153">看出規律了嗎？</text:span><text:span text:style-name="T244">只要有一邊是空的，NPL 就是 0</text:span><text:span text:style-name="T153">。要兩邊都長得夠深，NPL 才會變大。</text:span><text:soft-page-break/><text:span text:style-name="T153">它量的就是「離最近的空位有幾步」。</text:span></text:p>
      <text:p text:style-name="P28" loext:marker-style-name="T152"><text:span text:style-name="T162">怎麼算 NPL？</text:span><text:span text:style-name="T153">其實不用背公式，只要做一件事——「數步數」：</text:span></text:p>
      <table:table table:name="表格N1" table:style-name="表格N1">
        <table:table-column table:style-name="表格N1.A"/>
        <table:table-row table:style-name="表格N1.1">
          <table:table-cell table:style-name="表格N1.A1" office:value-type="string">
            <text:p text:style-name="P33" loext:marker-style-name="T162"><text:span text:style-name="T174">站在某個點上往下看，最少走幾步會碰到一個「還缺小孩的點」</text:span><text:span text:style-name="T162">——</text:span><text:span text:style-name="T245">那個步數就是 NPL</text:span><text:span text:style-name="T162">。</text:span></text:p>
            <text:p text:style-name="P33" loext:marker-style-name="T164"><text:span text:style-name="T165">（「</text:span><text:span text:style-name="T246">缺小孩」＝葉子，或</text:span><text:span text:style-name="T247">只有一個小孩的點</text:span><text:span text:style-name="T165">。）</text:span></text:p>
            <text:p text:style-name="P33" loext:marker-style-name="T164"><text:span text:style-name="T165">• </text:span><text:span text:style-name="T173">這個點自己就缺小孩 </text:span><text:span text:style-name="T165">→ </text:span><text:span text:style-name="T185">0 步，NPL = 0</text:span></text:p>
            <text:p text:style-name="P35" loext:marker-style-name="T164"><text:span text:style-name="T165">• 兩個小孩都在 → 還得再往下走 → NPL 才會 ≥ 1（</text:span><text:span text:style-name="T248">永遠取「比較近」的那一邊</text:span><text:span text:style-name="T165">）</text:span></text:p>
          </table:table-cell>
        </table:table-row>
      </table:table>
      <text:p text:style-name="P28" loext:marker-style-name="T152"><text:span text:style-name="T153">套到剛才那棵樹上，看圖數一遍就懂了：</text:span></text:p>
      <text:p text:style-name="P29" loext:marker-style-name="T154"><text:span text:style-name="T154"><text:s text:c="10"/>3 <text:s text:c="7"/>← 想算它的 NPL</text:span><text:span text:style-name="T154"/></text:p>
      <text:p text:style-name="P31" loext:marker-style-name="T154"><text:span text:style-name="T154"><text:s text:c="9"/>/ \</text:span><text:span text:style-name="T154"/></text:p>
      <text:p text:style-name="P31" loext:marker-style-name="T154"><text:span text:style-name="T154"><text:s text:c="8"/>5 <text:s text:c="2"/>8</text:span><text:span text:style-name="T154"/></text:p>
      <text:p text:style-name="P31" loext:marker-style-name="T154"><text:span text:style-name="T154"><text:s text:c="7"/>/ \</text:span><text:span text:style-name="T154"/></text:p>
      <text:p text:style-name="P31" loext:marker-style-name="T154"><text:span text:style-name="T154"><text:s text:c="6"/>9 <text:s text:c="2"/>7</text:span><text:span text:style-name="T154"/></text:p>
      <text:p text:style-name="P30"/>
      <text:p text:style-name="P31" loext:marker-style-name="T154"><text:span text:style-name="T154"><text:s text:c="2"/></text:span><text:span text:style-name="T155">9、7、8：都是葉子，自己就缺小孩 <text:s/>→ 0 步</text:span><text:span text:style-name="T154"> → </text:span><text:span text:style-name="T249">NPL = 0</text:span></text:p>
      <text:p text:style-name="P31" loext:marker-style-name="T154"><text:span text:style-name="T154"><text:s text:c="2"/></text:span><text:span text:style-name="T155">5 <text:s text:c="3"/>：往下 1 步就碰到葉子 9</text:span><text:span text:style-name="T154"> <text:s text:c="4"/>→ </text:span><text:span text:style-name="T249">NPL = 1</text:span></text:p>
      <text:p text:style-name="P32" loext:marker-style-name="T154"><text:span text:style-name="T154"><text:s text:c="2"/></text:span><text:span text:style-name="T155">3 <text:s text:c="3"/>：往右 1 步就碰到葉子 8</text:span><text:span text:style-name="T154"> <text:s text:c="4"/>→ </text:span><text:span text:style-name="T249">NPL = 1</text:span><text:span text:style-name="T154">（取最近的一邊）</text:span></text:p>
      <text:p text:style-name="P28" loext:marker-style-name="T152"><text:span text:style-name="T153">（看到課本把它寫成公式 NPL = 1 + min(左, 右) 也別怕，意思就是上面這個「數步數」，看懂圖就夠了。）</text:span></text:p>
      <text:p text:style-name="P28" loext:marker-style-name="T152"><text:span text:style-name="T162">左偏性質（Leftist Property）：</text:span><text:span text:style-name="T153">每個節點都必須符合一條規定——</text:span></text:p>
      <table:table table:name="表格M8" table:style-name="表格M8">
        <table:table-column table:style-name="表格M8.A"/>
        <table:table-row table:style-name="表格M8.1">
          <table:table-cell table:style-name="表格M8.A1" office:value-type="string">
            <text:p text:style-name="P33" loext:marker-style-name="T162"><text:span text:style-name="T204">對每個節點：NPL(左子樹) ≥ NPL(右子樹)</text:span></text:p>
            <text:p text:style-name="P33" loext:marker-style-name="T164"><text:span text:style-name="T165">白話：左邊一定比右邊深、或一樣深 → </text:span><text:span text:style-name="T250">右側那條路一定是最短的</text:span><text:span text:style-name="T165">。</text:span></text:p>
            <text:p text:style-name="P35" loext:marker-style-name="T164"><text:span text:style-name="T165">數學上可保證：右側路徑長度 ≤ log(n+1)，所以 Merge 沿右路徑走 → </text:span><text:span text:style-name="T166">O(log n)</text:span><text:span text:style-name="T165">。</text:span></text:p>
          </table:table-cell>
        </table:table-row>
      </table:table>
      <text:p text:style-name="P36"/>
      <text:h text:style-name="P27" text:outline-level="2" loext:marker-style-name="T147"><text:span text:style-name="T147">8-5 <text:s/></text:span><text:span text:style-name="T251">Merge 真正流程：</text:span><text:span text:style-name="T252">其實只有四步</text:span></text:h>
      <text:p text:style-name="P28" loext:marker-style-name="T152"><text:span text:style-name="T153">不管樹多大，Merge 永遠只重複這四步（以 </text:span><text:span text:style-name="T152">Min Leftist Heap</text:span><text:span text:style-name="T153"> 為例）：</text:span></text:p>
      <text:p text:style-name="P29" loext:marker-style-name="T154"><text:span text:style-name="T154"><text:s text:c="2"/>Step1 <text:s/></text:span><text:span text:style-name="T253">比較兩個 Root</text:span></text:p>
      <text:p text:style-name="P31" loext:marker-style-name="T154"><text:span text:style-name="T154"><text:s text:c="9"/>→ </text:span><text:span text:style-name="T254">小的當新 Root</text:span><text:span text:style-name="T154">（Min Heap）</text:span></text:p>
      <text:p text:style-name="P31" loext:marker-style-name="T154"><text:span text:style-name="T154"><text:s text:c="9"/>→ </text:span><text:span text:style-name="T179">大的那棵整棵丟去後面排隊</text:span><text:span text:style-name="T154">（叫它 b）</text:span></text:p>
      <text:p text:style-name="P30"/>
      <text:p text:style-name="P31" loext:marker-style-name="T154"><text:span text:style-name="T154"><text:s text:c="2"/>Step2 <text:s/></text:span><text:span text:style-name="T155">把 b 拿去跟</text:span><text:span text:style-name="T154">「</text:span><text:span text:style-name="T255">新 Root 的右子樹</text:span><text:span text:style-name="T154">」</text:span><text:span text:style-name="T155">Merge</text:span></text:p>
      <text:p text:style-name="P31" loext:marker-style-name="T154"><text:span text:style-name="T154"><text:s text:c="9"/>→ Merge(newRoot.right, b) <text:s text:c="2"/>← 永遠是右子樹！</text:span><text:span text:style-name="T154"/></text:p>
      <text:p text:style-name="P30"/>
      <text:p text:style-name="P31" loext:marker-style-name="T154"><text:span text:style-name="T154"><text:s text:c="2"/>Step3 <text:s/></text:span><text:span text:style-name="T256">Merge 完，看右邊是不是變太長了？</text:span></text:p>
      <text:p text:style-name="P31" loext:marker-style-name="T154"><text:span text:style-name="T154"><text:s text:c="9"/>→ </text:span><text:span text:style-name="T233">若 NPL(右) &gt; NPL(左) 就「交換左右」</text:span><text:span text:style-name="T154">，恢復左偏</text:span></text:p>
      <text:p text:style-name="P30"/>
      <text:p text:style-name="P32" loext:marker-style-name="T154"><text:span text:style-name="T154"><text:s text:c="2"/>Step4 <text:s/>更新這個節點的 NPL</text:span><text:span text:style-name="T154"/></text:p>
      <table:table table:name="表格M9" table:style-name="表格M9">
        <table:table-column table:style-name="表格M9.A"/>
        <table:table-row table:style-name="表格M9.1">
          <table:table-cell table:style-name="表格M9.A1" office:value-type="string">
            <text:p text:style-name="P33" loext:marker-style-name="T162"><text:span text:style-name="T163">口訣：比較 Root → 走右邊 → 必要時交換左右 → 更新 NPL</text:span></text:p>
            <text:p text:style-name="P35" loext:marker-style-name="T164"><text:span text:style-name="T165">整個演算法就是一直重複這四個動作，沿著右邊往下、再一路回來。</text:span></text:p>
          </table:table-cell>
        </table:table-row>
      </table:table>
      <text:p text:style-name="P36"/>
      <text:h text:style-name="P27" text:outline-level="2" loext:marker-style-name="T147"><text:soft-page-break/><text:span text:style-name="T147">8-6 <text:s/></text:span><text:span text:style-name="T148">完整 Merge 範例（一步一步畫圖）</text:span></text:h>
      <text:p text:style-name="P28" loext:marker-style-name="T152"><text:span text:style-name="T163">先說一件會讓你輕鬆很多的事：</text:span><text:span text:style-name="T153">這個範例，我們先「完全不管 NPL」。第一次學 Merge，只要記住一句話就好——</text:span></text:p>
      <table:table table:name="表格X1" table:style-name="表格X1">
        <table:table-column table:style-name="表格X1.A"/>
        <table:table-row table:style-name="表格X1.1">
          <table:table-cell table:style-name="表格X1.A1" office:value-type="string">
            <text:p text:style-name="P33" loext:marker-style-name="T162"><text:span text:style-name="T257">Merge 永遠只走「右子樹」</text:span><text:span text:style-name="T163">。</text:span></text:p>
            <text:p text:style-name="P35" loext:marker-style-name="T164"><text:span text:style-name="T165">其他所有動作，都是為了保護這一件事而已。</text:span></text:p>
          </table:table-cell>
        </table:table-row>
      </table:table>
      <text:p text:style-name="P28" loext:marker-style-name="T152"><text:span text:style-name="T153">要合併的是這兩棵（先不標任何數字，專心看流程）：</text:span></text:p>
      <text:p text:style-name="P29" loext:marker-style-name="T154"><text:span text:style-name="T154"><text:s text:c="3"/>Heap A <text:s text:c="13"/>Heap B</text:span><text:span text:style-name="T154"/></text:p>
      <text:p text:style-name="P31" loext:marker-style-name="T154"><text:span text:style-name="T154"><text:s text:c="6"/>3 <text:s text:c="18"/>6</text:span><text:span text:style-name="T154"/></text:p>
      <text:p text:style-name="P31" loext:marker-style-name="T154"><text:span text:style-name="T154"><text:s text:c="5"/>/ \ <text:s text:c="16"/>/ \</text:span><text:span text:style-name="T154"/></text:p>
      <text:p text:style-name="P32" loext:marker-style-name="T154"><text:span text:style-name="T154"><text:s text:c="4"/>5 <text:s text:c="2"/>8 <text:s text:c="13"/>12 <text:s text:c="2"/>7</text:span><text:span text:style-name="T154"/></text:p>
      <text:p text:style-name="P28" loext:marker-style-name="T152"><text:span text:style-name="T163">① </text:span><text:span text:style-name="T258">比 Root</text:span><text:span text:style-name="T163">：</text:span><text:span text:style-name="T259">3 和 6 誰小？3 小 → 3 當新 Root</text:span><text:span text:style-name="T153">。</text:span></text:p>
      <text:p text:style-name="P28" loext:marker-style-name="T152"><text:span text:style-name="T260">重點：</text:span><text:span text:style-name="T261">左子樹 5 完全沒動，之後也不會再動</text:span><text:span text:style-name="T153">。</text:span><text:span text:style-name="T262">我們只需要一直處理「右邊」</text:span><text:span text:style-name="T153">。</text:span></text:p>
      <text:p text:style-name="P29" loext:marker-style-name="T154"><text:span text:style-name="T154"><text:s text:c="7"/>3 <text:s text:c="9"/>← 3 當新 Root</text:span><text:span text:style-name="T154"/></text:p>
      <text:p text:style-name="P31" loext:marker-style-name="T154"><text:span text:style-name="T154"><text:s text:c="6"/>/ \</text:span><text:span text:style-name="T154"/></text:p>
      <text:p text:style-name="P32" loext:marker-style-name="T154"><text:span text:style-name="T154"><text:s text:c="5"/>5 <text:s text:c="2"/>? <text:s text:c="7"/>← 左邊 5 不動；只有右邊「?」要繼續算</text:span><text:span text:style-name="T154"/></text:p>
      <text:p text:style-name="P28" loext:marker-style-name="T152"><text:span text:style-name="T163">② </text:span><text:span text:style-name="T258">那 6 放哪？</text:span><text:span text:style-name="T263">不是放左邊，也不是重蓋一棵。</text:span><text:span text:style-name="T257">6 要「去跟 3 的右子樹 8 合併」</text:span><text:span text:style-name="T153">。問題就縮小成：8 和 6 怎麼 Merge？</text:span></text:p>
      <text:p text:style-name="P28" loext:marker-style-name="T152"><text:span text:style-name="T163">③</text:span><text:span text:style-name="T258"> 比 8 和 6</text:span><text:span text:style-name="T163">：</text:span><text:span text:style-name="T259">6 小 → 6 當 Root</text:span><text:span text:style-name="T153">。接著</text:span><text:span text:style-name="T257">換成「6 的右子樹 7」要跟 8 合併</text:span><text:span text:style-name="T153">。</text:span></text:p>
      <text:p text:style-name="P29" loext:marker-style-name="T154"><text:span text:style-name="T154"><text:s text:c="5"/>6</text:span><text:span text:style-name="T154"/></text:p>
      <text:p text:style-name="P31" loext:marker-style-name="T154"><text:span text:style-name="T154"><text:s text:c="4"/>/ \</text:span><text:span text:style-name="T154"/></text:p>
      <text:p text:style-name="P32" loext:marker-style-name="T154"><text:span text:style-name="T154"><text:s text:c="3"/>12 <text:s text:c="2"/>? <text:s text:c="7"/>← </text:span><text:span text:style-name="T264">左邊 12 不動；右邊要算 Merge(7, 8)</text:span></text:p>
      <text:p text:style-name="P28" loext:marker-style-name="T152"><text:span text:style-name="T163">④ </text:span><text:span text:style-name="T258">比 7 和 8</text:span><text:span text:style-name="T163">：</text:span><text:span text:style-name="T259">7 小 → 7 當 Root</text:span><text:span text:style-name="T153">。</text:span><text:span text:style-name="T257">8 直接接到 7 的右邊</text:span><text:span text:style-name="T153">（因為 7 的右邊本來是空的）。</text:span></text:p>
      <text:p text:style-name="P29" loext:marker-style-name="T154"><text:span text:style-name="T154"><text:s text:c="3"/>7</text:span><text:span text:style-name="T154"/></text:p>
      <text:p text:style-name="P31" loext:marker-style-name="T154"><text:span text:style-name="T154"><text:s text:c="4"/>\</text:span><text:span text:style-name="T154"/></text:p>
      <text:p text:style-name="P32" loext:marker-style-name="T154"><text:span text:style-name="T154"><text:s text:c="5"/>8 <text:s text:c="9"/>← 先接成這樣</text:span><text:span text:style-name="T154"/></text:p>
      <text:p text:style-name="P28" loext:marker-style-name="T152"><text:span text:style-name="T260">⑤ 這一步是大家最卡的地方。</text:span><text:span text:style-name="T153">你一定會想：</text:span><text:span text:style-name="T265">幹嘛突然要交換左右？</text:span><text:span text:style-name="T153">原因只有一句話——</text:span></text:p>
      <table:table table:name="表格X2" table:style-name="表格X2">
        <table:table-column table:style-name="表格X2.A"/>
        <table:table-row table:style-name="表格X2.1">
          <table:table-cell table:style-name="表格X2.A1" office:value-type="string">
            <text:p text:style-name="P33" loext:marker-style-name="T162"><text:span text:style-name="T265">Leftist Heap 的規定：右邊的 NPL 不能大於左邊的 NPL。</text:span><text:span text:style-name="T163">。</text:span></text:p>
            <text:p text:style-name="P35" loext:marker-style-name="T164"><text:span text:style-name="T262">現在 7 的右邊有個 8、左邊卻是空的 → 右邊比較深 → 所以把它交換過來</text:span><text:span text:style-name="T165">。</text:span></text:p>
          </table:table-cell>
        </table:table-row>
      </table:table>
      <text:p text:style-name="P28" loext:marker-style-name="T152"><text:span text:style-name="T266">交換後</text:span><text:span text:style-name="T153">（</text:span><text:span text:style-name="T257">把 8 搬到左邊，右邊就空了、變短了</text:span><text:span text:style-name="T153">）：</text:span></text:p>
      <text:p text:style-name="P29" loext:marker-style-name="T154"><text:span text:style-name="T154"><text:s text:c="3"/>7</text:span><text:span text:style-name="T154"/></text:p>
      <text:p text:style-name="P31" loext:marker-style-name="T154"><text:span text:style-name="T154"><text:s text:c="2"/>/</text:span><text:span text:style-name="T154"/></text:p>
      <text:p text:style-name="P32" loext:marker-style-name="T154"><text:span text:style-name="T154"><text:s/>8 <text:s text:c="11"/>← </text:span><text:span text:style-name="T267">右邊清空，右邊變短 ✓</text:span></text:p>
      <text:p text:style-name="P28" loext:marker-style-name="T152"><text:span text:style-name="T262">接下來就是「一路往回接」，每接回一層，就再看一次右邊有沒有比左邊深</text:span><text:span text:style-name="T163">。</text:span></text:p>
      <text:p text:style-name="P28" loext:marker-style-name="T152"><text:span text:style-name="T163">⑥ 把剛算好的 7 接回 6 的右邊：</text:span></text:p>
      <text:p text:style-name="P29" loext:marker-style-name="T154"><text:span text:style-name="T154"><text:s text:c="5"/>6</text:span><text:span text:style-name="T154"/></text:p>
      <text:p text:style-name="P31" loext:marker-style-name="T154"><text:span text:style-name="T154"><text:s text:c="4"/>/ \</text:span><text:span text:style-name="T154"/></text:p>
      <text:p text:style-name="P31" loext:marker-style-name="T154"><text:span text:style-name="T154"><text:s text:c="3"/>12 <text:s text:c="2"/>7</text:span><text:span text:style-name="T154"/></text:p>
      <text:p text:style-name="P31" loext:marker-style-name="T154"><text:span text:style-name="T154"><text:s text:c="7"/>/</text:span><text:span text:style-name="T154"/></text:p>
      <text:p text:style-name="P32" loext:marker-style-name="T154"><text:span text:style-name="T154"><text:s text:c="6"/>8</text:span><text:span text:style-name="T154"/></text:p>
      <text:p text:style-name="P43" loext:marker-style-name="T152"><text:span text:style-name="T153">看 6 的左右子樹：左邊 NPL = 0、右邊 NPL = 0，符合 Leftist Heap（左 NPL ≥ 右 NPL），因此不用交換。(</text:span>"看 6 的左右子樹：左邊 NPL = 0、右邊 NPL = 0" 這怎麼對?</text:p>
      <text:p text:style-name="P44"><text:soft-page-break/>你抓到重點了，<text:span text:style-name="Strong_20_Emphasis">不是直接看就知道是 0，要先算！</text:span></text:p>
      <text:p text:style-name="P44">如果你的筆記採用的是<text:span text:style-name="Strong_20_Emphasis">最常見的定義</text:span>：</text:p>
      <text:list text:style-name="L1">
        <text:list-item>
          <text:p text:style-name="P45"><text:span text:style-name="Source_20_Text">NPL(NULL) = -1</text:span> </text:p>
        </text:list-item>
        <text:list-item>
          <text:p text:style-name="P45"><text:span text:style-name="Source_20_Text">NPL(葉節點) = 0</text:span> </text:p>
        </text:list-item>
        <text:list-item>
          <text:p text:style-name="P46"><text:span text:style-name="Source_20_Text">NPL(x) = min(NPL(left), NPL(right)) + 1</text:span> </text:p>
        </text:list-item>
      </text:list>
      <text:p text:style-name="P44">那就要這樣算：</text:p>
      <text:p text:style-name="P47">第一步：算 8</text:p>
      <text:section text:style-name="Sect1" text:name="code-block-viewer">
        <text:p text:style-name="P48"><text:span text:style-name="Source_20_Text">8</text:span></text:p>
      </text:section>
      <text:p text:style-name="P44">8 是葉節點，所以</text:p>
      <text:section text:style-name="Sect1" text:name="區段1">
        <text:p text:style-name="P48"><text:bookmark text:name="code-block-viewer"/><text:span text:style-name="Source_20_Text">NPL(8) = 0</text:span></text:p>
      </text:section>
      <text:p text:style-name="P49"/>
      <text:p text:style-name="P47">第二步：算 7</text:p>
      <text:section text:style-name="Sect1" text:name="區段2">
        <text:p text:style-name="P48"><text:bookmark text:name="code-block-viewer 副本 1"/><text:span text:style-name="Source_20_Text"><text:s text:c="3"/>7</text:span></text:p>
        <text:p text:style-name="P50"><text:span text:style-name="Source_20_Text"><text:s text:c="2"/>/</text:span></text:p>
        <text:p text:style-name="P50"><text:span text:style-name="Source_20_Text"><text:s/>8</text:span></text:p>
      </text:section>
      <text:p text:style-name="P44">左子樹：</text:p>
      <text:section text:style-name="Sect1" text:name="區段3">
        <text:p text:style-name="P48"><text:bookmark text:name="code-block-viewer 副本 2"/><text:span text:style-name="Source_20_Text">NPL(8)=0</text:span></text:p>
      </text:section>
      <text:p text:style-name="P44">右子樹：</text:p>
      <text:section text:style-name="Sect1" text:name="區段4">
        <text:p text:style-name="P48"><text:bookmark text:name="code-block-viewer 副本 3"/><text:span text:style-name="Source_20_Text">NPL(NULL)=-1</text:span></text:p>
      </text:section>
      <text:p text:style-name="P44">因此</text:p>
      <text:section text:style-name="Sect1" text:name="區段5">
        <text:p text:style-name="P48"><text:bookmark text:name="code-block-viewer 副本 4"/><text:span text:style-name="Source_20_Text">NPL(7)</text:span></text:p>
        <text:p text:style-name="P50"><text:span text:style-name="Source_20_Text">= </text:span><text:span text:style-name="Source_20_Text"><text:span text:style-name="T268">min(0,-1)+1</text:span></text:span></text:p>
        <text:p text:style-name="P50"><text:span text:style-name="Source_20_Text">= 0</text:span></text:p>
      </text:section>
      <text:p text:style-name="P49"/>
      <text:p text:style-name="P47">第三步：算 12</text:p>
      <text:section text:style-name="Sect1" text:name="區段6">
        <text:p text:style-name="P48"><text:bookmark text:name="code-block-viewer 副本 5"/><text:span text:style-name="Source_20_Text">12</text:span></text:p>
      </text:section>
      <text:p text:style-name="P44">葉節點，所以</text:p>
      <text:section text:style-name="Sect1" text:name="區段7">
        <text:p text:style-name="P48"><text:bookmark text:name="code-block-viewer 副本 6"/><text:span text:style-name="Source_20_Text">NPL(12)=0</text:span></text:p>
      </text:section>
      <text:p text:style-name="P49"/>
      <text:p text:style-name="P47">第四步：再回到 6</text:p>
      <text:section text:style-name="Sect1" text:name="區段8">
        <text:p text:style-name="P48"><text:bookmark text:name="code-block-viewer 副本 7"/><text:span text:style-name="Source_20_Text"><text:s text:c="6"/>6</text:span></text:p>
        <text:p text:style-name="P50"><text:span text:style-name="Source_20_Text"><text:s text:c="5"/>/ \</text:span></text:p>
        <text:p text:style-name="P50"><text:soft-page-break/><text:span text:style-name="Source_20_Text"><text:s text:c="3"/>12 <text:s text:c="2"/>7</text:span></text:p>
        <text:p text:style-name="P50"><text:span text:style-name="Source_20_Text"><text:s text:c="7"/>/</text:span></text:p>
        <text:p text:style-name="P50"><text:span text:style-name="Source_20_Text"><text:s text:c="6"/>8</text:span></text:p>
      </text:section>
      <text:p text:style-name="P44">此時才知道</text:p>
      <text:section text:style-name="Sect1" text:name="區段9">
        <text:p text:style-name="P48"><text:bookmark text:name="code-block-viewer 副本 8"/><text:span text:style-name="Source_20_Text">左子樹 NPL = 0</text:span></text:p>
        <text:p text:style-name="P50"><text:span text:style-name="Source_20_Text">右子樹 NPL = 0</text:span></text:p>
      </text:section>
      <text:p text:style-name="P44">因此不用交換。</text:p>
      <text:p text:style-name="P49"/>
      <text:h text:style-name="P51" text:outline-level="2">所以我上一句少了一個步驟</text:h>
      <text:p text:style-name="P44">我直接寫</text:p>
      <text:p text:style-name="P52">左邊 NPL = 0、右邊 NPL = 0</text:p>
      <text:p text:style-name="P44"><text:span text:style-name="Strong_20_Emphasis">太跳了。</text:span></text:p>
      <text:p text:style-name="P44">應該改成：</text:p>
      <text:p text:style-name="P52"><text:span text:style-name="Strong_20_Emphasis">因為剛才已算出 </text:span><text:span text:style-name="Strong_20_Emphasis"><text:span text:style-name="Source_20_Text">NPL(7)=0</text:span></text:span><text:span text:style-name="Strong_20_Emphasis">，而 </text:span><text:span text:style-name="Strong_20_Emphasis"><text:span text:style-name="Source_20_Text">12</text:span></text:span><text:span text:style-name="Strong_20_Emphasis"> 為葉節點，</text:span><text:span text:style-name="Strong_20_Emphasis"><text:span text:style-name="Source_20_Text">NPL(12)=0</text:span></text:span><text:span text:style-name="Strong_20_Emphasis">，所以左右 NPL 相同，不用交換。</text:span></text:p>
      <text:p text:style-name="P44">或更簡潔：</text:p>
      <text:p text:style-name="P52"><text:span text:style-name="Strong_20_Emphasis">剛才已算得 </text:span><text:span text:style-name="Strong_20_Emphasis"><text:span text:style-name="Source_20_Text">NPL(7)=0</text:span></text:span><text:span text:style-name="Strong_20_Emphasis">；12 為葉節點，</text:span><text:span text:style-name="Strong_20_Emphasis"><text:span text:style-name="Source_20_Text">NPL(12)=0</text:span></text:span><text:span text:style-name="Strong_20_Emphasis">，因此不用交換。</text:span></text:p>
      <text:p text:style-name="P44">這樣讀者才知道 <text:span text:style-name="Strong_20_Emphasis">0 是怎麼來的</text:span>，不會覺得是憑空冒出來的。</text:p>
      <text:p text:style-name="P53" loext:marker-style-name="T152">)</text:p>
      <text:p text:style-name="P28" loext:marker-style-name="T152"><text:span text:style-name="T163">⑦ 再把剛算好的 6 接回 3 的右邊：</text:span></text:p>
      <text:p text:style-name="P29" loext:marker-style-name="T154"><text:span text:style-name="T154"><text:s text:c="5"/>3</text:span><text:span text:style-name="T154"/></text:p>
      <text:p text:style-name="P31" loext:marker-style-name="T154"><text:span text:style-name="T154"><text:s text:c="4"/>/ \</text:span><text:span text:style-name="T154"/></text:p>
      <text:p text:style-name="P31" loext:marker-style-name="T154"><text:span text:style-name="T154"><text:s text:c="3"/>5 <text:s text:c="2"/>6 <text:s text:c="7"/>← 先接成這樣</text:span><text:span text:style-name="T154"/></text:p>
      <text:p text:style-name="P31" loext:marker-style-name="T154"><text:span text:style-name="T154"><text:s text:c="6"/>/ \</text:span><text:span text:style-name="T154"/></text:p>
      <text:p text:style-name="P31" loext:marker-style-name="T154"><text:span text:style-name="T154"><text:s text:c="4"/>12 <text:s text:c="2"/>7</text:span><text:span text:style-name="T154"/></text:p>
      <text:p text:style-name="P31" loext:marker-style-name="T154"><text:span text:style-name="T154"><text:s text:c="8"/>/</text:span><text:span text:style-name="T154"/></text:p>
      <text:p text:style-name="P32" loext:marker-style-name="T154"><text:span text:style-name="T154"><text:s text:c="7"/>8</text:span><text:span text:style-name="T154"/></text:p>
      <text:p text:style-name="P28" loext:marker-style-name="T152"><text:span text:style-name="T153">看 3 的左右：左邊 5 只有一層、右邊 6 那一大串很深 → </text:span><text:span text:style-name="T260">右邊比較深 → 交換！</text:span></text:p>
      <text:p text:style-name="P54" loext:marker-style-name="T152"><text:span text:style-name="T163">(</text:span>"看 3 的左右：左邊 5 只有一層、右邊 6 那一大串很深 → 右邊比較深 → 交換！" 那這對嗎?</text:p>
      <text:p text:style-name="P55"><text:span text:style-name="Strong_20_Emphasis">這一句在這個例子裡，可以。</text:span></text:p>
      <text:p text:style-name="P55">因為它是在描述<text:span text:style-name="Strong_20_Emphasis">直觀現象</text:span>，不是拿來當正式判斷規則。</text:p>
      <text:p text:style-name="P55">例如：</text:p>
      <text:section text:style-name="Sect1" text:name="區段10">
        <text:p text:style-name="P56"><text:bookmark text:name="code-block-viewer 副本 9"/><text:span text:style-name="Source_20_Text"><text:s text:c="6"/>3</text:span></text:p>
        <text:p text:style-name="P57"><text:span text:style-name="Source_20_Text"><text:s text:c="5"/>/ \</text:span></text:p>
        <text:p text:style-name="P57"><text:span text:style-name="Source_20_Text"><text:s text:c="4"/>5 <text:s text:c="2"/>6</text:span></text:p>
        <text:p text:style-name="P57"><text:soft-page-break/><text:span text:style-name="Source_20_Text"><text:s text:c="7"/>/</text:span></text:p>
        <text:p text:style-name="P57"><text:span text:style-name="Source_20_Text"><text:s text:c="6"/>7</text:span></text:p>
        <text:p text:style-name="P57"><text:span text:style-name="Source_20_Text"><text:s text:c="5"/>/</text:span></text:p>
        <text:p text:style-name="P57"><text:span text:style-name="Source_20_Text"><text:s text:c="4"/>8</text:span></text:p>
      </text:section>
      <text:p text:style-name="P55">很明顯：</text:p>
      <text:list text:style-name="L2">
        <text:list-item>
          <text:p text:style-name="P58">左邊只有一個節點 5 </text:p>
        </text:list-item>
        <text:list-item>
          <text:p text:style-name="P59">右邊有 6→7→8 一整串 </text:p>
        </text:list-item>
      </text:list>
      <text:p text:style-name="P55">所以你寫：</text:p>
      <text:p text:style-name="P60"><text:span text:style-name="Strong_20_Emphasis">看 3 的左右：左邊 5 只有一層、右邊 6 那一大串很深 → 右邊比較深 → 交換！</text:span></text:p>
      <text:p text:style-name="P55"><text:span text:style-name="Strong_20_Emphasis">這個例子得到的結論是正確的。</text:span></text:p>
      <text:p text:style-name="P61"/>
      <text:h text:style-name="P51" text:outline-level="2">為什麼這句可以，而「看 6 的左右」不可以？</text:h>
      <text:p text:style-name="P55">因為：</text:p>
      <text:p text:style-name="P62">對節點 3</text:p>
      <text:section text:style-name="Sect1" text:name="區段11">
        <text:p text:style-name="P56"><text:bookmark text:name="code-block-viewer 副本 10"/><text:span text:style-name="Source_20_Text">左：</text:span></text:p>
        <text:p text:style-name="P57"><text:span text:style-name="Source_20_Text">5</text:span></text:p>
        <text:p text:style-name="P57"><text:span text:style-name="Source_20_Text">右：</text:span></text:p>
        <text:p text:style-name="P57"><text:span text:style-name="Source_20_Text">6</text:span></text:p>
        <text:p text:style-name="P57"><text:span text:style-name="Source_20_Text">|</text:span></text:p>
        <text:p text:style-name="P57"><text:span text:style-name="Source_20_Text">7</text:span></text:p>
        <text:p text:style-name="P57"><text:span text:style-name="Source_20_Text">|</text:span></text:p>
        <text:p text:style-name="P57"><text:span text:style-name="Source_20_Text">8</text:span></text:p>
      </text:section>
      <text:p text:style-name="P55"><text:span text:style-name="Strong_20_Emphasis">不管看高度還是看 NPL，都一定是右邊比較大。</text:span></text:p>
      <text:p text:style-name="P55">所以交換一定沒錯。</text:p>
      <text:p text:style-name="P61"/>
      <text:p text:style-name="P62">但是對節點 6</text:p>
      <text:section text:style-name="Sect1" text:name="區段12">
        <text:p text:style-name="P56"><text:bookmark text:name="code-block-viewer 副本 11"/><text:span text:style-name="Source_20_Text"><text:s text:c="4"/>6</text:span></text:p>
        <text:p text:style-name="P57"><text:span text:style-name="Source_20_Text"><text:s text:c="3"/>/ \</text:span></text:p>
        <text:p text:style-name="P57"><text:span text:style-name="Source_20_Text"><text:s/>12 <text:s text:c="2"/>7</text:span></text:p>
        <text:p text:style-name="P57"><text:span text:style-name="Source_20_Text"><text:s text:c="5"/>/</text:span></text:p>
        <text:p text:style-name="P57"><text:span text:style-name="Source_20_Text"><text:s text:c="4"/>8</text:span></text:p>
      </text:section>
      <text:p text:style-name="P55">如果看高度：</text:p>
      <text:list text:style-name="L3">
        <text:list-item>
          <text:p text:style-name="P63"><text:soft-page-break/>左 = 1 層 </text:p>
        </text:list-item>
        <text:list-item>
          <text:p text:style-name="P64">右 = 2 層 </text:p>
        </text:list-item>
      </text:list>
      <text:p text:style-name="P55">你會得到：</text:p>
      <text:p text:style-name="P60">右邊比較深 → 應該交換</text:p>
      <text:p text:style-name="P55">但真正答案是：</text:p>
      <text:p text:style-name="P60"><text:span text:style-name="Strong_20_Emphasis">不用交換。</text:span></text:p>
      <text:p text:style-name="P55">所以這裡就不能再用「深度」當理由。</text:p>
      <text:p text:style-name="P61"/>
      <text:h text:style-name="P51" text:outline-level="2">我會建議你的筆記這樣寫</text:h>
      <text:p text:style-name="P62">Step 5（7 和 8）</text:p>
      <text:p text:style-name="P55">可以寫：</text:p>
      <text:p text:style-name="P60">左邊空、右邊有節點，因此交換左右子樹。</text:p>
      <text:p text:style-name="P55">（不用講 NPL。）</text:p>
      <text:p text:style-name="P61"/>
      <text:p text:style-name="P62">Step 6（接回 6）</text:p>
      <text:p text:style-name="P55">改成：</text:p>
      <text:p text:style-name="P60"><text:span text:style-name="Strong_20_Emphasis">檢查 NPL：左、右 NPL 相同，因此不用交換。</text:span></text:p>
      <text:p text:style-name="P61"/>
      <text:p text:style-name="P62">Step 7（接回 3）</text:p>
      <text:p text:style-name="P55">可以再寫：</text:p>
      <text:p text:style-name="P60"><text:span text:style-name="Strong_20_Emphasis">左子樹只有 5，右子樹是一整串，因此交換左右子樹。</text:span></text:p>
      <text:p text:style-name="P55">因為這裡右邊真的比左邊「大很多」，直觀和 NPL 的判斷一致，不會誤導。</text:p>
      <text:p text:style-name="P61"/>
      <text:p text:style-name="P55"><text:span text:style-name="Strong_20_Emphasis">一句話總結：</text:span></text:p>
      <text:list text:style-name="L4">
        <text:list-item>
          <text:p text:style-name="P65"><text:span text:style-name="Strong_20_Emphasis">「右邊很深，所以交換」</text:span>：在 <text:span text:style-name="Strong_20_Emphasis">3</text:span> 這一步可以用（剛好符合事實）。 </text:p>
        </text:list-item>
        <text:list-item>
          <text:p text:style-name="P66"><text:span text:style-name="Strong_20_Emphasis">「右邊很深，所以不用交換」</text:span>：在 <text:span text:style-name="Strong_20_Emphasis">6</text:span> 這一步絕對不能用，因為會和 Leftist Heap 的真正規則衝突。</text:p>
        </text:list-item>
      </text:list>
      <text:p text:style-name="P67" loext:marker-style-name="T152">)</text:p>
      <text:p text:style-name="P68" loext:marker-style-name="T152">交換之後，就是最終答案：</text:p>
      <text:p text:style-name="P29" loext:marker-style-name="T154"><text:span text:style-name="T154"><text:s text:c="3"/>最終結果</text:span><text:span text:style-name="T154"/></text:p>
      <text:p text:style-name="P31" loext:marker-style-name="T154"><text:span text:style-name="T154"><text:s text:c="8"/>3</text:span><text:span text:style-name="T154"/></text:p>
      <text:p text:style-name="P31" loext:marker-style-name="T154"><text:span text:style-name="T154"><text:s text:c="7"/>/ \</text:span><text:span text:style-name="T154"/></text:p>
      <text:p text:style-name="P31" loext:marker-style-name="T154"><text:span text:style-name="T154"><text:s text:c="6"/>6 <text:s text:c="2"/>5</text:span><text:span text:style-name="T154"/></text:p>
      <text:p text:style-name="P31" loext:marker-style-name="T154"><text:span text:style-name="T154"><text:s text:c="5"/>/ \</text:span><text:span text:style-name="T154"/></text:p>
      <text:p text:style-name="P31" loext:marker-style-name="T154"><text:soft-page-break/><text:span text:style-name="T154"><text:s text:c="3"/>12 <text:s text:c="2"/>7</text:span><text:span text:style-name="T154"/></text:p>
      <text:p text:style-name="P31" loext:marker-style-name="T154"><text:span text:style-name="T154"><text:s text:c="7"/>/</text:span><text:span text:style-name="T154"/></text:p>
      <text:p text:style-name="P32" loext:marker-style-name="T154"><text:span text:style-name="T154"><text:s text:c="6"/>8</text:span><text:span text:style-name="T154"/></text:p>
      <table:table table:name="表格X3" table:style-name="表格X3">
        <table:table-column table:style-name="表格X3.A"/>
        <table:table-row table:style-name="表格X3.1">
          <table:table-cell table:style-name="表格X3.A1" office:value-type="string">
            <text:p text:style-name="P33" loext:marker-style-name="T162"><text:span text:style-name="T163">驗證一下就安心了：</text:span></text:p>
            <text:p text:style-name="P33" loext:marker-style-name="T162"><text:span text:style-name="T165">Min Heap（父 &lt; 子）：3&lt;6、3&lt;5、6&lt;12、6&lt;7、7&lt;8 ✓</text:span></text:p>
            <text:p text:style-name="P69"><text:span text:style-name="T235">每個節點：右邊都沒有比左邊深 ✓（這就是「左偏」）</text:span></text:p>
          </table:table-cell>
        </table:table-row>
      </table:table>
      <table:table table:name="表格X4" table:style-name="表格X4">
        <table:table-column table:style-name="表格X4.A"/>
        <table:table-row table:style-name="表格X4.1">
          <table:table-cell table:style-name="表格X4.A1" office:value-type="string">
            <text:p text:style-name="P33" loext:marker-style-name="T162"><text:span text:style-name="T163">口訣：整個 Merge 其實只有這幾件事一直重複——</text:span></text:p>
            <text:p text:style-name="P33" loext:marker-style-name="T162"><text:span text:style-name="T165">① Root 比大小，小的當家。<text:line-break/>② 接好後，若右邊 NPL 比左邊大，就交換左右。<text:line-break/>③ 回上一層，重複直到 Root。</text:span></text:p>
          </table:table-cell>
        </table:table-row>
      </table:table>
      <text:p text:style-name="P28" loext:marker-style-name="T152"><text:span text:style-name="T153">（那程式怎麼知道「右邊比較深」？就是用前面 8-4 講的 NPL 這個數字來判斷。但第一次學，會「看圖判斷」就完全夠了。）</text:span></text:p>
      <text:p text:style-name="P36"/>
      <text:h text:style-name="P27" text:outline-level="2" loext:marker-style-name="T147"><text:span text:style-name="T147">8-7 <text:s/></text:span><text:span text:style-name="T148">時間複雜度與重點整理</text:span></text:h>
      <text:p text:style-name="P28" loext:marker-style-name="T152"><text:span text:style-name="T153">為什麼 Leftist Heap 快？因為它不重建整棵樹，只沿「被 NPL 保證很短的右路徑」遞迴。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26"><text:span text:style-name="T227">操作</text:span><text:span text:style-name="T226"/></text:p>
          </table:table-cell>
          <table:table-cell table:style-name="表格47.A1" office:value-type="string">
            <text:p text:style-name="Standard" loext:marker-style-name="T226"><text:span text:style-name="T227">普通 </text:span><text:span text:style-name="T226">Binary Heap</text:span></text:p>
          </table:table-cell>
          <table:table-cell table:style-name="表格47.A1" office:value-type="string">
            <text:p text:style-name="Standard" loext:marker-style-name="T226"><text:span text:style-name="T226">Leftist Heap</text:span><text:span text:style-name="T226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8"><text:span text:style-name="T228">Insert</text:span><text:span text:style-name="T228"/></text:p>
          </table:table-cell>
          <table:table-cell table:style-name="表格47.A2" office:value-type="string">
            <text:p text:style-name="Standard" loext:marker-style-name="T228"><text:span text:style-name="T228">O(log n)</text:span><text:span text:style-name="T228"/></text:p>
          </table:table-cell>
          <table:table-cell table:style-name="表格47.A2" office:value-type="string">
            <text:p text:style-name="Standard" loext:marker-style-name="T228"><text:span text:style-name="T228">O(log n)</text:span><text:span text:style-name="T228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8"><text:span text:style-name="T228">Extract-Min/Max</text:span><text:span text:style-name="T228"/></text:p>
          </table:table-cell>
          <table:table-cell table:style-name="表格47.A3" office:value-type="string">
            <text:p text:style-name="Standard" loext:marker-style-name="T228"><text:span text:style-name="T228">O(log n)</text:span><text:span text:style-name="T228"/></text:p>
          </table:table-cell>
          <table:table-cell table:style-name="表格47.A3" office:value-type="string">
            <text:p text:style-name="Standard" loext:marker-style-name="T228"><text:span text:style-name="T228">O(log n)</text:span><text:span text:style-name="T228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8"><text:span text:style-name="T228">Merge</text:span><text:span text:style-name="T229">（合併兩個 </text:span><text:span text:style-name="T228">Heap</text:span><text:span text:style-name="T229">）</text:span></text:p>
          </table:table-cell>
          <table:table-cell table:style-name="表格47.A2" office:value-type="string">
            <text:p text:style-name="Standard" loext:marker-style-name="T228"><text:span text:style-name="T228">O(n+m) </text:span><text:span text:style-name="T229">重建</text:span></text:p>
          </table:table-cell>
          <table:table-cell table:style-name="表格47.A2" office:value-type="string">
            <text:p text:style-name="Standard" loext:marker-style-name="T228"><text:span text:style-name="T228">O(log n + log m) ★</text:span><text:span text:style-name="T228"/></text:p>
          </table:table-cell>
        </table:table-row>
      </table:table>
      <text:p text:style-name="P33"/>
      <table:table table:name="表格M11" table:style-name="表格M11">
        <table:table-column table:style-name="表格M11.A"/>
        <table:table-row table:style-name="表格M11.1">
          <table:table-cell table:style-name="表格M11.A1" office:value-type="string">
            <text:p text:style-name="P33" loext:marker-style-name="T162"><text:span text:style-name="T162">⚠️ 陷阱：Min Leftist Heap vs. Max Leftist Heap</text:span></text:p>
            <text:p text:style-name="P33" loext:marker-style-name="T164"><text:span text:style-name="T165">Min Leftist Heap → Merge 時，</text:span><text:span text:style-name="T166">較小</text:span><text:span text:style-name="T165">的 Root 當新 Root。</text:span></text:p>
            <text:p text:style-name="P33" loext:marker-style-name="T164"><text:span text:style-name="T165">Max Leftist Heap → Merge 時，</text:span><text:span text:style-name="T166">較大</text:span><text:span text:style-name="T165">的 Root 當新 Root。</text:span></text:p>
            <text:p text:style-name="P35" loext:marker-style-name="T164"><text:span text:style-name="T165">四個步驟完全一樣，只有「誰當新 Root」的比較方向相反。考試看清楚題目要的是哪一種！</text:span></text:p>
          </table:table-cell>
        </table:table-row>
      </table:table>
      <text:p text:style-name="P3"/>
      <text:h text:style-name="P4" text:outline-level="1" loext:marker-style-name="T7"><text:span text:style-name="T8">九、</text:span><text:span text:style-name="T9">Heap</text:span><text:span text:style-name="T65"> vs. </text:span><text:span text:style-name="T9">BST / AVL / Red-Black Tree</text:span><text:span text:style-name="T65"> </text:span><text:span text:style-name="T8">深度比較</text:span></text:h>
      <text:p text:style-name="P5" loext:marker-style-name="T67"><text:span text:style-name="T68">這是許多考生最容易混淆的地方，必須徹底釐清各資料結構的設計目的。</text:span><text:span text:style-name="T67"/></text:p>
      <text:p text:style-name="P3"/>
      <text:h text:style-name="P6" text:outline-level="2" loext:marker-style-name="T13"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ext:soft-page-break/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75">左 </text:span><text:span text:style-name="T23">&lt; </text:span><text:span text:style-name="T75">根 </text:span><text:span text:style-name="T23">&lt; </text:span><text:span text:style-name="T75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穩定搜尋</text:span></text:p>
          </table:table-cell>
          <table:table-cell table:style-name="表格49.A2" office:value-type="string">
            <text:p text:style-name="P10" loext:marker-style-name="T22"><text:span text:style-name="T75">高度差 ≤ </text:span><text:span text:style-name="T23">1</text:span><text:span text:style-name="T75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75">平衡 </text:span><text:span text:style-name="T23">BST</text:span><text:span text:style-name="T75">，減少旋轉</text:span></text:p>
          </table:table-cell>
          <table:table-cell table:style-name="表格49.A2" office:value-type="string">
            <text:p text:style-name="P10" loext:marker-style-name="T22"><text:span text:style-name="T75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75">快速取最大</text:span><text:span text:style-name="T23">/</text:span><text:span text:style-name="T75">最小值</text:span></text:p>
          </table:table-cell>
          <table:table-cell table:style-name="表格49.A2" office:value-type="string">
            <text:p text:style-name="P10" loext:marker-style-name="T22"><text:span text:style-name="T75">父 ≥ 子（</text:span><text:span text:style-name="T23">Max</text:span><text:span text:style-name="T75">）或父 ≤ 子（</text:span><text:span text:style-name="T23">Min</text:span><text:span text:style-name="T75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10" loext:marker-style-name="T27"><text:span text:style-name="T139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211">BST</text:span><text:span text:style-name="T139">（平衡）</text:span><text:span text:style-name="T211">/ AVL / RB</text:span></text:p>
            </table:table-cell>
            <table:table-cell table:style-name="表格50.A1" office:value-type="string">
              <text:p text:style-name="P10" loext:marker-style-name="T27"><text:span text:style-name="T211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39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75">找最大值（</text:span><text:span text:style-name="T23">view</text:span><text:span text:style-name="T75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75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75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75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75">找 </text:span><text:span text:style-name="T23">+ O(log n) </text:span><text:span text:style-name="T75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75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75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「</text:span><text:span text:style-name="T23">Max Heap </text:span><text:span text:style-name="T75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75">錯誤答案：</text:span><text:span text:style-name="T23">O(log n) <text:s/>← </text:span><text:span text:style-name="T75">看到樹就聯想 </text:span><text:span text:style-name="T23">log n </text:span><text:span text:style-name="T75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75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75">原因：</text:span><text:span text:style-name="T23">Heap </text:span><text:span text:style-name="T75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75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66"> </text:span><text:span text:style-name="T14">選擇 </text:span><text:span text:style-name="T15">Red-Black Tree</text:span><text:span text:style-name="T66"> </text:span><text:span text:style-name="T14">而非 </text:span><text:span text:style-name="T15">AVL</text:span><text:span text:style-name="T14">？</text:span></text:h>
      <text:list text:continue-list="list4053014634" text:style-name="WWNum2">
        <text:list-item>
          <text:p text:style-name="P24" loext:marker-style-name="T67"><text:span text:style-name="T71">AVL</text:span><text:span text:style-name="T68">：搜尋最快，但插入</text:span><text:span text:style-name="T71">/</text:span><text:span text:style-name="T68">刪除旋轉次數多，修改成本高。</text:span></text:p>
        </text:list-item>
        <text:list-item>
          <text:p text:style-name="P24" loext:marker-style-name="T67"><text:span text:style-name="T71">Red-Black Tree</text:span><text:span text:style-name="T68">：搜尋稍慢，但插入</text:span><text:span text:style-name="T71">/</text:span><text:span text:style-name="T68">刪除旋轉較少，整體效能均衡。</text:span></text:p>
        </text:list-item>
        <text:list-item>
          <text:p text:style-name="P24" loext:marker-style-name="T67"><text:span text:style-name="T71">Linux Kernel </text:span><text:span text:style-name="T68">的 </text:span><text:span text:style-name="T71">CFS </text:span><text:span text:style-name="T68">排程器、記憶體管理（</text:span><text:span text:style-name="T71">VMA</text:span><text:span text:style-name="T68">）、</text:span><text:span text:style-name="T71">Timer </text:span><text:span text:style-name="T68">均採用 </text:span><text:span text:style-name="T71">Red-Black Tree</text:span><text:span text:style-name="T68">。</text:span></text:p>
        </text:list-item>
      </text:list>
      <text:p text:style-name="P3"/>
      <text:p text:style-name="P3"/>
      <text:h text:style-name="P4" text:outline-level="1" loext:marker-style-name="T7"><text:soft-page-break/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1</text:span><text:span text:style-name="T75">：</text:span><text:span text:style-name="T23">Heap </text:span><text:span text:style-name="T75">搜尋 ≠ </text:span><text:span text:style-name="T23">O(log n)</text:span><text:span text:style-name="T75">，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2</text:span><text:span text:style-name="T75">：</text:span><text:span text:style-name="T23">Build Heap ≠ O(n log n)</text:span><text:span text:style-name="T75">，</text:span><text:span text:style-name="T23">Bottom-Up </text:span><text:span text:style-name="T75">法正確為 </text:span><text:span text:style-name="T23">O(n)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3</text:span><text:span text:style-name="T75">：</text:span><text:span text:style-name="T23">Heap </text:span><text:span text:style-name="T75">是 </text:span><text:span text:style-name="T23">Complete Binary Tree</text:span><text:span text:style-name="T75">，不是 </text:span><text:span text:style-name="T23">Full Binary Tree</text:span><text:span text:style-name="T75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4</text:span><text:span text:style-name="T75">：陣列索引從 </text:span><text:span text:style-name="T23">1 </text:span><text:span text:style-name="T75">開始，</text:span><text:span text:style-name="T23">parent = ⌊i/2⌋</text:span><text:span text:style-name="T75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5</text:span><text:span text:style-name="T75">：</text:span><text:span text:style-name="T23">Interval Heap </text:span><text:span text:style-name="T75">每個節點存的是區間 </text:span><text:span text:style-name="T23">[min, max]</text:span><text:span text:style-name="T75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6</text:span><text:span text:style-name="T75">：</text:span><text:span text:style-name="T23">Merge Leftist Heap </text:span><text:span text:style-name="T75">的新 </text:span><text:span text:style-name="T23">Root </text:span><text:span text:style-name="T75">是兩個 </text:span><text:span text:style-name="T23">Root </text:span><text:span text:style-name="T75">中較小的（</text:span><text:span text:style-name="T23">Min Heap</text:span><text:span text:style-name="T75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75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7</text:span><text:span text:style-name="T75">：</text:span><text:span text:style-name="T23">Heap Sort </text:span><text:span text:style-name="T75">是 </text:span><text:span text:style-name="T23">Unstable Sort</text:span><text:span text:style-name="T75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75">陷阱 </text:span><text:span text:style-name="T23">8</text:span><text:span text:style-name="T75">：</text:span><text:span text:style-name="T23">Heap Sort </text:span><text:span text:style-name="T75">空間複雜度是 </text:span><text:span text:style-name="T23">O(1)</text:span><text:span text:style-name="T75">（</text:span><text:span text:style-name="T23">In-place</text:span><text:span text:style-name="T75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75">（</text:span><text:span text:style-name="T23">parent ≤/≥ child</text:span><text:span text:style-name="T75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75">陣列索引（從 </text:span><text:span text:style-name="T23">1 </text:span><text:span text:style-name="T75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75">（</text:span><text:span text:style-name="T23">Bubble 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75">（</text:span><text:span text:style-name="T23">Heapify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最多走 </text:span><text:span text:style-name="T23">h = log n </text:span><text:span text:style-name="T75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75">（</text:span><text:span text:style-name="T23">Bottom-Up</text:span><text:span text:style-name="T75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75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逐個 </text:span><text:span text:style-name="T23">Insert </text:span><text:span text:style-name="T75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75">次 </text:span><text:span text:style-name="T23">× O(log n)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75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75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75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66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39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39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75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75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75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75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75">最均衡</text:span></text:p>
          </table:table-cell>
        </table:table-row>
      </table:table>
      <text:p text:style-name="P3"/>
      <text:h text:style-name="P6" text:outline-level="2" loext:marker-style-name="T13"><text:span text:style-name="T66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75">（</text:span><text:span text:style-name="T23">Bubble Down</text:span><text:span text:style-name="T75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75">（</text:span><text:span text:style-name="T23">Bottom-Up</text:span><text:span text:style-name="T75">）</text:span><text:span text:style-name="T23">= O(n) <text:s/>★ </text:span><text:span text:style-name="T75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75">，</text:span><text:span text:style-name="T23">In-place</text:span><text:span text:style-name="T75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25T18:49:11.881594400</dc:date>
    <meta:editing-cycles>271</meta:editing-cycles>
    <meta:editing-duration>P1DT5H15M28S</meta:editing-duration>
    <meta:generator>LibreOffice/26.2.4.2$Windows_X86_64 LibreOffice_project/0229ac93fcf0d7cbc6376066c6f35021cef002dc</meta:generator>
    <meta:document-statistic meta:table-count="64" meta:image-count="0" meta:object-count="0" meta:page-count="36" meta:paragraph-count="1010" meta:word-count="9682" meta:character-count="22287" meta:non-whitespace-character-count="15170"/>
    <meta:user-defined meta:name="AppVersion">15.0000</meta:user-defined>
  </office:meta>
</office:document-meta>
</file>