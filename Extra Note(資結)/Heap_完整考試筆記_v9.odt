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.A35" style:family="table-cell">
      <style:table-cell-properties fo:background-color="#ff4081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3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4" style:family="paragraph" style:parent-style-name="Standard">
      <style:paragraph-properties fo:margin-top="0.053cm" fo:margin-bottom="0.053cm" style:contextual-spacing="false"/>
    </style:style>
    <style:style style:name="P5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7" style:family="paragraph" style:parent-style-name="Standard">
      <style:paragraph-properties fo:margin-top="0cm" fo:margin-bottom="0.212cm" style:contextual-spacing="false"/>
    </style:style>
    <style:style style:name="P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9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1" style:family="paragraph" style:parent-style-name="Standard">
      <style:paragraph-properties fo:margin-top="0cm" fo:margin-bottom="0.141cm" style:contextual-spacing="false"/>
    </style:style>
    <style:style style:name="P12" style:family="paragraph" style:parent-style-name="Standard">
      <style:paragraph-properties fo:margin-top="0cm" fo:margin-bottom="0.282cm" style:contextual-spacing="false"/>
    </style:style>
    <style:style style:name="P13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4" style:family="paragraph" style:parent-style-name="Standard">
      <style:paragraph-properties fo:margin-top="0cm" fo:margin-bottom="0.071cm" style:contextual-spacing="false"/>
    </style:style>
    <style:style style:name="P15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6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7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1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9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20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8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9" style:family="paragraph" style:parent-style-name="List_20_Paragraph" style:list-style-name="WWNum14">
      <style:paragraph-properties fo:margin-top="0cm" fo:margin-bottom="0.141cm" style:contextual-spacing="false"/>
    </style:style>
    <style:style style:name="P3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1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margin-top="0.106cm" fo:margin-bottom="0.106cm" style:contextual-spacing="false"/>
    </style:style>
    <style:style style:name="P34" style:family="paragraph" style:parent-style-name="Standard">
      <style:paragraph-properties fo:margin-top="0.053cm" fo:margin-bottom="0.053cm" style:contextual-spacing="false"/>
    </style:style>
    <style:style style:name="P35" style:family="paragraph" style:parent-style-name="Standard">
      <style:paragraph-properties fo:margin-top="0.318cm" fo:margin-bottom="0.106cm" style:contextual-spacing="false"/>
    </style:style>
    <style:style style:name="P36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37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38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39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40" style:family="paragraph" style:parent-style-name="Standard" style:list-style-name="WWNum2">
      <style:paragraph-properties fo:margin-top="0.071cm" fo:margin-bottom="0.071cm" style:contextual-spacing="false"/>
    </style:style>
    <style:style style:name="P41" style:family="paragraph" style:parent-style-name="Standard">
      <style:paragraph-properties fo:margin-top="0cm" fo:margin-bottom="0.212cm" style:contextual-spacing="false"/>
    </style:style>
    <style:style style:name="P42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43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44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5" style:family="paragraph" style:parent-style-name="Standard">
      <style:paragraph-properties fo:margin-top="0cm" fo:margin-bottom="0.141cm" style:contextual-spacing="false"/>
    </style:style>
    <style:style style:name="P46" style:family="paragraph" style:parent-style-name="Standard">
      <style:paragraph-properties fo:margin-top="0cm" fo:margin-bottom="0cm" style:contextual-spacing="false"/>
    </style:style>
    <style:style style:name="P47" style:family="paragraph" style:parent-style-name="Standard">
      <style:paragraph-properties fo:margin-top="0.353cm" fo:margin-bottom="0.176cm" style:contextual-spacing="false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7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8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0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4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2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3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4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5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46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47" style:family="text">
      <style:text-properties fo:color="#595959" loext:opacity="100%" fo:font-size="11pt" style:font-size-asian="11pt" style:font-name-complex="Arial2" style:font-size-complex="11pt"/>
    </style:style>
    <style:style style:name="T48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49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0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2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53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55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59" style:family="text">
      <style:text-properties fo:color="#595959" loext:opacity="100%" fo:font-size="10.5pt" style:font-size-asian="10.5pt" style:font-name-complex="Arial2" style:font-size-complex="10.5pt"/>
    </style:style>
    <style:style style:name="T60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1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62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63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4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5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66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67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8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69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0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1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2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3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4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75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6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7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8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79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0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82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83" style:family="text">
      <style:text-properties fo:color="#18ffff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84" style:family="text">
      <style:text-properties fo:color="#18ffff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85" style:family="text">
      <style:text-properties fo:color="#18ffff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86" style:family="text">
      <style:text-properties fo:color="#18ffff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87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88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9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0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1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2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93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95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9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7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8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99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04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05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6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0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08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09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10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11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12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13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14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15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16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17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18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19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0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1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22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23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24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25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27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28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29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30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31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32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33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34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35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36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37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38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39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40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41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142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43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4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45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46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47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48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49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50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51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52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3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54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5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156" style:family="text">
      <style:text-properties fo:color="#ffea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57" style:family="text">
      <style:text-properties fo:color="#ffea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58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59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60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61" style:family="text">
      <style:text-properties fo:color="#ffea00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162" style:family="text">
      <style:text-properties fo:color="#ffea00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163" style:family="text">
      <style:text-properties fo:color="#ffea00" loext:opacity="100%" style:font-name="Arial1" fo:font-size="12pt" fo:font-weight="bold" fo:background-color="#1a237e" loext:char-shading-value="0" style:font-name-asian="Arial2" style:font-size-asian="12pt" style:font-weight-asian="bold" style:font-name-complex="Arial2" style:font-size-complex="12pt" style:font-weight-complex="bold"/>
    </style:style>
    <style:style style:name="T164" style:family="text">
      <style:text-properties fo:color="#ffea0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65" style:family="text">
      <style:text-properties fo:color="#ffea0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66" style:family="text">
      <style:text-properties fo:color="#ffea00" loext:opacity="100%" style:font-name="Arial1" fo:font-size="12pt" style:font-name-asian="Arial2" style:font-size-asian="12pt" style:font-name-complex="Arial2" style:font-size-complex="12pt"/>
    </style:style>
    <style:style style:name="T167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168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169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70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71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72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73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74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75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76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77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78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9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0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81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182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83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84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85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86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87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88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89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90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91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92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93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94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5" style:family="text">
      <style:text-properties fo:font-weight="bold" fo:background-color="#ffd740" loext:char-shading-value="0" style:font-weight-asian="bold" style:font-weight-complex="bold"/>
    </style:style>
    <style:style style:name="T196" style:family="text">
      <style:text-properties fo:font-weight="bold" fo:background-color="#18ffff" loext:char-shading-value="0" style:font-weight-asian="bold" style:font-weight-complex="bold"/>
    </style:style>
    <style:style style:name="T197" style:family="text">
      <style:text-properties fo:font-weight="bold" fo:background-color="#ffff00" loext:char-shading-value="0" style:font-weight-asian="bold" style:font-weight-complex="bold"/>
    </style:style>
    <style:style style:name="T198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99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00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201" style:family="text">
      <style:text-properties fo:font-size="10.5pt" style:font-name-asian="Arial2" style:font-size-asian="10.5pt" style:font-name-complex="Arial2" style:font-size-complex="10.5pt"/>
    </style:style>
    <style:style style:name="T202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03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04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205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6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207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208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209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10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11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12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13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214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15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216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217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18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19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20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221" style:family="text">
      <style:text-properties fo:color="#1a1a1a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222" style:family="text">
      <style:text-properties fo:color="#1a1a1a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223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24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25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226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7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8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9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0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1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32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33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34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35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36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37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38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39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40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41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42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31" loext:marker-style-name="T15"><text:span text:style-name="T16">資訊類公職考試完整筆記 ● 考點：</text:span><text:span text:style-name="T24">110</text:span><text:span text:style-name="T16">地</text:span><text:span text:style-name="T24">Q4</text:span><text:span text:style-name="T16">、</text:span><text:span text:style-name="T24">111</text:span><text:span text:style-name="T16">地</text:span><text:span text:style-name="T24">Q4</text:span><text:span text:style-name="T16">、</text:span><text:span text:style-name="T24">113</text:span><text:span text:style-name="T16">地</text:span><text:span text:style-name="T24">Q3</text:span><text:span text:style-name="T16">、</text:span><text:span text:style-name="T24">114</text:span><text:span text:style-name="T16">地</text:span><text:span text:style-name="T24">Q2</text:span></text:p>
      <text:p text:style-name="P1"/>
      <text:h text:style-name="P15" text:outline-level="1" loext:marker-style-name="T3"><text:span text:style-name="T4">一、</text:span><text:span text:style-name="T10">Heap </text:span><text:span text:style-name="T4">的定義與兩大條件</text:span></text:h>
      <text:p text:style-name="P33" loext:marker-style-name="T27"><text:span text:style-name="T43">Heap</text:span><text:span text:style-name="T28">（堆積）是一種特殊的二元樹，必須同時滿足以下兩個條件，缺一不可：</text:span></text:p>
      <text:p text:style-name="P1"/>
      <text:h text:style-name="P18" text:outline-level="2" loext:marker-style-name="T17"><text:span text:style-name="T18">條件</text:span><text:span text:style-name="T25">1</text:span><text:span text:style-name="T18">：</text:span><text:span text:style-name="T25">Complete Binary Tree</text:span><text:span text:style-name="T18">（完全二元樹）</text:span></text:h>
      <text:list xml:id="list549856339" text:style-name="WWNum5">
        <text:list-item text:start-value="1">
          <text:p text:style-name="P20" loext:marker-style-name="T33"><text:span text:style-name="T63">每一層節點都必須盡量填滿</text:span><text:span text:style-name="T34">。</text:span></text:p>
        </text:list-item>
        <text:list-item text:style-override="WWNum6">
          <text:p text:style-name="P21" loext:marker-style-name="T33"><text:span text:style-name="T35">最後一層</text:span><text:span text:style-name="T34">的節點必須</text:span><text:span text:style-name="T74">從左往右依序填入</text:span><text:span text:style-name="T34">，</text:span><text:span text:style-name="T77">不可跳過</text:span><text:span text:style-name="T34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 loext:marker-style-name="T41"><text:span text:style-name="T48">✅ </text:span><text:span text:style-name="T42">合法 </text:span><text:span text:style-name="T48">Complete Binary Tree</text:span><text:span text:style-name="T42">：</text:span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/ \ <text:s text:c="5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36"><text:span text:style-name="T49">70 <text:s/>60 50</text:span><text:span text:style-name="T36"/></text:p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❌ </text:span><text:span text:style-name="T42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\ <text:s text:c="2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6"/></text:span><text:span text:style-name="T49">60 50</text:span></text:p>
          </table:table-cell>
        </table:table-row>
      </table:table>
      <text:p text:style-name="P1"/>
      <text:h text:style-name="P18" text:outline-level="2" loext:marker-style-name="T17"><text:span text:style-name="T18">條件</text:span><text:span text:style-name="T25">2</text:span><text:span text:style-name="T18">：</text:span><text:span text:style-name="T25">Heap Property</text:span><text:span text:style-name="T18">（堆積性質）</text:span></text:h>
      <text:p text:style-name="P33" loext:marker-style-name="T27"><text:span text:style-name="T28">父節點與子節點之間必須滿足固定的大小關係，分為兩種：</text:span><text:span text:style-name="T27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2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2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2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2" loext:marker-style-name="T41"><text:span text:style-name="T97">Min</text:span><text:span text:style-name="T48"> Heap</text:span></text:p>
          </table:table-cell>
          <table:table-cell table:style-name="表格2.A2" office:value-type="string">
            <text:p text:style-name="P32" loext:marker-style-name="T41"><text:span text:style-name="T48">parent ≤ child</text:span><text:span text:style-name="T42">（</text:span><text:span text:style-name="T37">父小子大</text:span><text:span text:style-name="T42">）</text:span></text:p>
          </table:table-cell>
          <table:table-cell table:style-name="表格2.A2" office:value-type="string">
            <text:p text:style-name="P32" loext:marker-style-name="T41"><text:span text:style-name="T48">Root </text:span><text:span text:style-name="T42">必為最小值</text:span></text:p>
          </table:table-cell>
        </table:table-row>
        <table:table-row table:style-name="表格2.1">
          <table:table-cell table:style-name="表格2.A3" office:value-type="string">
            <text:p text:style-name="P32" loext:marker-style-name="T41"><text:span text:style-name="T108">Max</text:span><text:span text:style-name="T48"> Heap</text:span></text:p>
          </table:table-cell>
          <table:table-cell table:style-name="表格2.A3" office:value-type="string">
            <text:p text:style-name="P32" loext:marker-style-name="T41"><text:span text:style-name="T48">parent ≥ child</text:span><text:span text:style-name="T42">（</text:span><text:span text:style-name="T38">父大子小</text:span><text:span text:style-name="T42">）</text:span></text:p>
          </table:table-cell>
          <table:table-cell table:style-name="表格2.A3" office:value-type="string">
            <text:p text:style-name="P32" loext:marker-style-name="T41"><text:span text:style-name="T48">Root </text:span><text:span text:style-name="T42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" loext:marker-style-name="T41"><text:span text:style-name="T48">📌 </text:span><text:span text:style-name="T42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4" loext:marker-style-name="T41"><text:span text:style-name="T49">Heap</text:span><text:span text:style-name="T48"> = </text:span><text:span text:style-name="T117">Complete Binary Tree + Heap Property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3" loext:marker-style-name="T27"><text:span text:style-name="T28">由於 </text:span><text:span text:style-name="T119">Heap </text:span><text:span text:style-name="T121">是 </text:span><text:span text:style-name="T119">Complete Binary Tree</text:span><text:span text:style-name="T28">，</text:span><text:span text:style-name="T135">節點位置完全可預測</text:span><text:span text:style-name="T28">，因此不需要指標（</text:span><text:span text:style-name="T43">pointer</text:span><text:span text:style-name="T28">），直接用陣列儲存即可，這稱為 </text:span><text:span text:style-name="T43">Implicit Array</text:span><text:span text:style-name="T28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" loext:marker-style-name="T41"><text:span text:style-name="T42">【索引公式 — 考試必背】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Root <text:s text:c="5"/>→ A[1]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44">Parent</text:span><text:span text:style-name="T48"> <text:s text:c="3"/>→ A[</text:span><text:span text:style-name="T87">i / 2</text:span><text:span text:style-name="T48">] <text:s text:c="5"/></text:span><text:span text:style-name="T42">（整數除法）</text:span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28">Left child</text:span><text:span text:style-name="T48"> → A[</text:span><text:span text:style-name="T98">2i</text:span><text:span text:style-name="T48">] <text:s text:c="6"/></text:span><text:span text:style-name="T42">（</text:span><text:span text:style-name="T153">多生貴子</text:span><text:span text:style-name="T42">）</text:span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28">Right child</text:span><text:span text:style-name="T48"> → A[</text:span><text:span text:style-name="T98">2i + 1</text:span><text:span text:style-name="T48">]</text:span></text:p>
          </table:table-cell>
        </table:table-row>
      </table:table>
      <text:p text:style-name="P1"/>
      <text:h text:style-name="P18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4" loext:marker-style-name="T41"><text:span text:style-name="T42">樹狀結構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5"/>90 <text:s text:c="4"/>8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5"/>/ \ <text:s text:c="4"/>/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/>70 <text:s/>60 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/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2">陣列儲存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2"/>Index: <text:s/>1 <text:s text:c="3"/>2 <text:s text:c="3"/>3 <text:s text:c="3"/>4 <text:s text:c="3"/>5 <text:s text:c="3"/>6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2"/>Value: 100 <text:s text:c="2"/>90 <text:s text:c="2"/>80 <text:s text:c="2"/>70 <text:s text:c="2"/>60 <text:s text:c="2"/>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/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2">驗證：</text:span><text:span text:style-name="T48">A[5] = 60</text:span><text:span text:style-name="T42">，</text:span><text:span text:style-name="T100">Parent = A[5/2] = A[2] </text:span><text:span text:style-name="T48">= 90 ✅</text:span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6"/></text:span><text:span text:style-name="T89">Left child = A[10]</text:span><text:span text:style-name="T42">，</text:span><text:span text:style-name="T155">Right child = A[11]</text:span><text:span text:style-name="T42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4" loext:marker-style-name="T41"><text:span text:style-name="T48">⚠️ <text:s/></text:span><text:span text:style-name="T42">考試陷阱：</text:span><text:span text:style-name="T78">陣列索引從 </text:span><text:span text:style-name="T87">1 </text:span><text:span text:style-name="T78">開始</text:span><text:span text:style-name="T42">，</text:span><text:span text:style-name="T35">不是 </text:span><text:span text:style-name="T49">0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4" loext:marker-style-name="T41"><text:span text:style-name="T48"><text:s text:c="5"/></text:span><text:span text:style-name="T42">若從 </text:span><text:span text:style-name="T48">0 </text:span><text:span text:style-name="T42">開始則公式不同：</text:span><text:span text:style-name="T48">parent=(i-1)/2, left=2i+1, right=2i+2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4" loext:marker-style-name="T41"><text:span text:style-name="T48"><text:s text:c="5"/></text:span><text:span text:style-name="T42">考題若未特別說明，</text:span><text:span text:style-name="T167">預設從 </text:span><text:span text:style-name="T168">1 </text:span><text:span text:style-name="T167">開始</text:span><text:span text:style-name="T42">。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三、</text:span><text:span text:style-name="T10">Heap </text:span><text:span text:style-name="T4">的核心操作與時間複雜度</text:span></text:h>
      <text:h text:style-name="P18" text:outline-level="2" loext:marker-style-name="T17"><text:span text:style-name="T25">3-1 </text:span><text:span text:style-name="T18">插入（</text:span><text:span text:style-name="T25">Insert</text:span><text:span text:style-name="T18">）— </text:span><text:span text:style-name="T25">Bubble Up</text:span><text:span text:style-name="T18">（向上浮）</text:span></text:h>
      <text:p text:style-name="P33" loext:marker-style-name="T27"><text:span text:style-name="T28">步驟：</text:span><text:span text:style-name="T27"/></text:p>
      <text:list xml:id="list84306788438521" text:continue-list="list549856339" text:style-name="WWNum7">
        <text:list-item>
          <text:p text:style-name="P22" loext:marker-style-name="T33"><text:span text:style-name="T58">Step 1</text:span><text:span text:style-name="T34">：</text:span><text:span text:style-name="T169">將新元素放到陣列最後一個位置</text:span><text:span text:style-name="T34">（</text:span><text:span text:style-name="T58">Complete Binary Tree </text:span><text:span text:style-name="T34">的下一個</text:span><text:span text:style-name="T35">空位</text:span><text:span text:style-name="T34">）。</text:span></text:p>
        </text:list-item>
        <text:list-item text:style-override="WWNum8">
          <text:p text:style-name="P23" loext:marker-style-name="T33"><text:span text:style-name="T58">Step 2</text:span><text:span text:style-name="T34">：</text:span><text:span text:style-name="T147">與父節點比較</text:span><text:span text:style-name="T34">，若違反 </text:span><text:span text:style-name="T58">Heap Property</text:span><text:span text:style-name="T34">，則交換。</text:span></text:p>
        </text:list-item>
        <text:list-item text:style-override="WWNum9">
          <text:p text:style-name="P24" loext:marker-style-name="T33"><text:span text:style-name="T58">Step 3</text:span><text:span text:style-name="T34">：重複 </text:span><text:span text:style-name="T58">Step 2</text:span><text:span text:style-name="T34">，一路往上，直到滿足 </text:span><text:span text:style-name="T58">Heap Property </text:span><text:span text:style-name="T34">或抵達 </text:span><text:span text:style-name="T58">Root </text:span><text:span text:style-name="T34">為止。</text:span></text:p>
        </text:list-item>
      </text:list>
      <text:p text:style-name="P1"/>
      <text:p text:style-name="P35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4" loext:marker-style-name="T41"><text:span text:style-name="T42">原始 </text:span><text:span text:style-name="T48">Max Heap</text:span><text:span text:style-name="T42">：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6"/>90 <text:s text:c="3"/>8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5"/>/ <text:s/>\ <text:s text:c="3"/>/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70 <text:s/>60 5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1</text:span><text:span text:style-name="T42">：</text:span><text:span text:style-name="T35">插入 </text:span><text:span text:style-name="T49">95</text:span><text:span text:style-name="T48"> → </text:span><text:span text:style-name="T37">放到 </text:span><text:span text:style-name="T51">index 7</text:span><text:span text:style-name="T37">（最後）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2</text:span><text:span text:style-name="T42">：</text:span><text:span text:style-name="T180">95 </text:span><text:span text:style-name="T181">的 </text:span><text:span text:style-name="T180">parent = A[7/2] = A[3]</text:span><text:span text:style-name="T48"> = 80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</text:span><text:span text:style-name="T49">95 &gt; 80</text:span><text:span text:style-name="T48"> → </text:span><text:span text:style-name="T42">違反 </text:span><text:span text:style-name="T48">Max Heap → </text:span><text:span text:style-name="T39">交換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</text:span><text:span text:style-name="T53">95</text:span><text:span text:style-name="T48">, 70, 60, 50, </text:span><text:span text:style-name="T53">80</text:span><text:span text:style-name="T48">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3</text:span><text:span text:style-name="T42">：</text:span><text:span text:style-name="T180">95 </text:span><text:span text:style-name="T181">的 </text:span><text:span text:style-name="T180">parent = A[3/2] = A[1]</text:span><text:span text:style-name="T48"> = 100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</text:span><text:span text:style-name="T49"><text:s/>95 &lt; 100</text:span><text:span text:style-name="T48"> → </text:span><text:span text:style-name="T42">符合 </text:span><text:span text:style-name="T48">Max Heap → </text:span><text:span text:style-name="T39">停止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ext:soft-page-break/>
        <table:table-row table:style-name="表格7.1">
          <table:table-cell table:style-name="表格7.A1" office:value-type="string">
            <text:p text:style-name="P4" loext:marker-style-name="T41"><text:span text:style-name="T42">最終結果：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36" loext:marker-style-name="T41"><text:span text:style-name="T48"><text:s text:c="5"/>/ <text:s/>\ <text:s text:c="2"/>/</text:span><text:span text:style-name="T41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37" loext:marker-style-name="T41"><text:s/><text:span text:style-name="T48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4" loext:marker-style-name="T41"><text:span text:style-name="T42">時間複雜度：</text:span><text:span text:style-name="T48">O(log n) <text:s/>← </text:span><text:span text:style-name="T42">最多往上走樹高（</text:span><text:span text:style-name="T48">h = log₂n</text:span><text:span text:style-name="T42">）步</text:span></text:p>
          </table:table-cell>
        </table:table-row>
      </table:table>
      <text:p text:style-name="P1"/>
      <text:p text:style-name="P1"/>
      <text:h text:style-name="P18" text:outline-level="2" loext:marker-style-name="T17"><text:span text:style-name="T25">3-2 </text:span><text:span text:style-name="T79">刪除最大值</text:span><text:span text:style-name="T18">（</text:span><text:span text:style-name="T25">Delete / Extract-Max</text:span><text:span text:style-name="T18">）— </text:span><text:span text:style-name="T25">Heapify</text:span><text:span text:style-name="T18">（向下沉）</text:span></text:h>
      <text:p text:style-name="P33" loext:marker-style-name="T27"><text:span text:style-name="T28">步驟：</text:span><text:span text:style-name="T27"/></text:p>
      <text:list xml:id="list84306381153363" text:continue-list="list84306788438521" text:style-name="WWNum10">
        <text:list-item>
          <text:p text:style-name="P25" loext:marker-style-name="T33"><text:span text:style-name="T58">Step 1</text:span><text:span text:style-name="T34">：</text:span><text:span text:style-name="T169">取出 </text:span><text:span text:style-name="T174">Root</text:span><text:span text:style-name="T169">（最大值）</text:span><text:span text:style-name="T34">。</text:span></text:p>
        </text:list-item>
        <text:list-item text:style-override="WWNum11">
          <text:p text:style-name="P26" loext:marker-style-name="T33"><text:span text:style-name="T58">Step 2</text:span><text:span text:style-name="T34">：</text:span><text:span text:style-name="T123">將陣列最後一個元素移到 </text:span><text:span text:style-name="T128">Root </text:span><text:span text:style-name="T123">位置。</text:span></text:p>
        </text:list-item>
        <text:list-item text:style-override="WWNum12">
          <text:p text:style-name="P27" loext:marker-style-name="T33"><text:span text:style-name="T58">Step 3</text:span><text:span text:style-name="T34">：</text:span><text:span text:style-name="T147">與兩個子節點中</text:span><text:span text:style-name="T183">較大的</text:span><text:span text:style-name="T147">比較</text:span><text:span text:style-name="T34">，若違反 </text:span><text:span text:style-name="T58">Heap Property</text:span><text:span text:style-name="T34">，則交換。</text:span></text:p>
        </text:list-item>
        <text:list-item text:style-override="WWNum13">
          <text:p text:style-name="P28" loext:marker-style-name="T33"><text:span text:style-name="T58">Step 4</text:span><text:span text:style-name="T34">：重複 </text:span><text:span text:style-name="T58">Step 3</text:span><text:span text:style-name="T34">（</text:span><text:span text:style-name="T58">Heapify / Bubble Down</text:span><text:span text:style-name="T34">），一路往下，直到滿足條件或抵達葉節點。</text:span></text:p>
        </text:list-item>
      </text:list>
      <text:p text:style-name="P1"/>
      <text:p text:style-name="P35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" loext:marker-style-name="T41"><text:span text:style-name="T42">原始 </text:span><text:span text:style-name="T48">Max Heap</text:span><text:span text:style-name="T42">：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10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90 <text:s text:c="3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 <text:s text:c="2"/>/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/>70 <text:s/>60 <text:s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1</text:span><text:span text:style-name="T42">：取出 </text:span><text:span text:style-name="T48">Root = 10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2</text:span><text:span text:style-name="T42">：</text:span><text:span text:style-name="T78">把最後元素 </text:span><text:span text:style-name="T87">50 </text:span><text:span text:style-name="T78">移到 </text:span><text:span text:style-name="T87">Root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9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4"/>70 <text:s/>60</text:span><text:span text:style-name="T41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3</text:span><text:span text:style-name="T42">：</text:span><text:span text:style-name="T100">50 </text:span><text:span text:style-name="T101">的子節點 </text:span><text:span text:style-name="T100">90</text:span><text:span text:style-name="T101">、</text:span><text:span text:style-name="T100">80</text:span><text:span text:style-name="T101">，較大為 </text:span><text:span text:style-name="T100">9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50 &lt; 9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5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4"/>7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4</text:span><text:span text:style-name="T42">：</text:span><text:span text:style-name="T100">50 </text:span><text:span text:style-name="T101">的子節點 </text:span><text:span text:style-name="T100">70</text:span><text:span text:style-name="T101">、</text:span><text:span text:style-name="T100">60</text:span><text:span text:style-name="T101">，較大為 </text:span><text:span text:style-name="T100">7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50 &lt; 7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7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3"/>5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5</text:span><text:span text:style-name="T42">：</text:span><text:span text:style-name="T48">50 </text:span><text:span text:style-name="T42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2">最終陣列：</text:span><text:span text:style-name="T48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" loext:marker-style-name="T41"><text:span text:style-name="T40">時間複雜度：</text:span><text:span text:style-name="T53">O(log n) </text:span><text:span text:style-name="T48"><text:s/>← </text:span><text:span text:style-name="T42">最多往下走樹高（</text:span><text:span text:style-name="T48">h = log₂n</text:span><text:span text:style-name="T42">）步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8" text:outline-level="2" loext:marker-style-name="T17"><text:span text:style-name="T18">方法 </text:span><text:span text:style-name="T26">A</text:span><text:span text:style-name="T18">：逐個插入法</text:span></text:h>
      <text:p text:style-name="P33" loext:marker-style-name="T29"><text:span text:style-name="T30">從</text:span><text:span text:style-name="T80">空</text:span><text:span text:style-name="T30"> </text:span><text:span text:style-name="T44">Heap</text:span><text:span text:style-name="T47"> </text:span><text:span text:style-name="T30">開始，呼叫 </text:span><text:span text:style-name="T105">n </text:span><text:span text:style-name="T102">次 </text:span><text:span text:style-name="T105">Insert</text:span><text:span text:style-name="T30">，每次 </text:span><text:span text:style-name="T177">O(log n)</text:span><text:span text:style-name="T30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" loext:marker-style-name="T41"><text:span text:style-name="T59">總時間：</text:span><text:span text:style-name="T145">n × O(log n)</text:span><text:span text:style-name="T48"> = O(n log n)</text:span></text:p>
          </table:table-cell>
        </table:table-row>
      </table:table>
      <text:p text:style-name="P1"/>
      <text:h text:style-name="P18" text:outline-level="2" loext:marker-style-name="T17"><text:span text:style-name="T18">方法 </text:span><text:span text:style-name="T26">B</text:span><text:span text:style-name="T18">：</text:span><text:span text:style-name="T25">Bottom-Up Build Heap</text:span><text:span text:style-name="T18">（</text:span><text:span text:style-name="T25">Floyd</text:span><text:span text:style-name="T26"> </text:span><text:span text:style-name="T18">演算法）★考試重點★</text:span></text:h>
      <text:p text:style-name="P33" loext:marker-style-name="T29"><text:span text:style-name="T30">直接</text:span><text:span text:style-name="T184">將 </text:span><text:span text:style-name="T187">n </text:span><text:span text:style-name="T184">個元素放入陣列</text:span><text:span text:style-name="T30">，從</text:span><text:span text:style-name="T80">最後一個非葉節點（</text:span><text:span text:style-name="T92">index = ⌊n/2⌋</text:span><text:span text:style-name="T80">）開始</text:span><text:span text:style-name="T30">，</text:span><text:span text:style-name="T148">由下往上</text:span><text:span text:style-name="T30">逐一執行 </text:span><text:span text:style-name="T47">Heapify</text:span><text:span text:style-name="T30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8" loext:marker-style-name="T189"><text:span text:style-name="T189">★ </text:span><text:span text:style-name="T190">為何從 <text:s text:c="2"/>?</text:span><text:span text:style-name="T189"> <text:s/>⌊n/2⌋ </text:span><text:span text:style-name="T190">開始？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87">index &gt; ⌊n/2⌋ </text:span><text:span text:style-name="T88">的節點全部都是葉節點</text:span><text:span text:style-name="T59">（</text:span><text:span text:style-name="T67">無子節點</text:span><text:span text:style-name="T59">），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59">葉節點本身已滿足 </text:span><text:span text:style-name="T48">Heap Property(</text:span><text:span text:style-name="T145">Heap Property</text:span><text:span text:style-name="T146">就是比較父節點</text:span><text:span text:style-name="T145">vs</text:span><text:span text:style-name="T146">子節點</text:span><text:span text:style-name="T59">；</text:span><text:span text:style-name="T175">葉節點沒有孩子 → 沒有東西可以比較 </text:span><text:span text:style-name="T42">→ 一定合法</text:span><text:span text:style-name="T59">。</text:span><text:span text:style-name="T48">)</text:span><text:span text:style-name="T59">，不需要 </text:span><text:span text:style-name="T48">Heapify</text:span><text:span text:style-name="T59">。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59">因此</text:span><text:span text:style-name="T129">只需從 </text:span><text:span text:style-name="T128">index ⌊n/2⌋ </text:span><text:span text:style-name="T129">往 </text:span><text:span text:style-name="T128">index 1 </text:span><text:span text:style-name="T129">逐一執行</text:span><text:span text:style-name="T59">。</text:span></text:p>
          </table:table-cell>
        </table:table-row>
      </table:table>
      <text:p text:style-name="P1"/>
      <text:p text:style-name="P39" loext:marker-style-name="T29"><text:span text:style-name="T31">範例：將 </text:span><text:span text:style-name="T45">[50, 30, 80, 10, 20, 70, 90] </text:span><text:span text:style-name="T31">建成 </text:span><text:span text:style-name="T45">Max Heap <text:s text:c="61"/></text:span></text:p>
      <text:p text:style-name="P39" loext:marker-style-name="T29"><text:span text:style-name="T45"/></text:p>
      <text:p text:style-name="P39" loext:marker-style-name="T29"><text:span text:style-name="T45">(</text:span><text:span text:style-name="T111">index = ⌊n/2⌋為最後一個非葉節點；index &gt; ⌊n/2⌋ 的節點全部都是葉節點</text:span><text:span text:style-name="T45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" loext:marker-style-name="T41"><text:span text:style-name="T59">初始陣列（</text:span><text:span text:style-name="T48">index </text:span><text:span text:style-name="T59">從 </text:span><text:span text:style-name="T48">1 </text:span><text:span text:style-name="T59">開始）：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index</text:span><text:span text:style-name="T59">： <text:s/></text:span><text:span text:style-name="T48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value</text:span><text:span text:style-name="T59">： <text:s/></text:span><text:span text:style-name="T48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4"/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9">n = 7</text:span><text:span text:style-name="T59">，</text:span><text:span text:style-name="T69">最後非葉節點 </text:span><text:span text:style-name="T70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59">（</text:span><text:span text:style-name="T90">index 4</text:span><text:span text:style-name="T91">、</text:span><text:span text:style-name="T90">5</text:span><text:span text:style-name="T91">、</text:span><text:span text:style-name="T90">6</text:span><text:span text:style-name="T91">、</text:span><text:span text:style-name="T90">7 </text:span><text:span text:style-name="T91">皆為葉節點</text:span><text:span text:style-name="T59">，不需 </text:span><text:span text:style-name="T48">Heapify</text:span><text:span text:style-name="T59">）</text:span></text:p>
          </table:table-cell>
        </table:table-row>
        <table:table-row table:style-name="表格13.1">
          <table:table-cell table:style-name="表格13.A1" office:value-type="string">
            <text:p text:style-name="P4"/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59">初始樹狀結構：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13"/>5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12"/>/ <text:s/>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8"/>30 <text:s text:c="3"/>8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7"/>/ \ <text:s text:c="6"/>/ 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3"/>10 <text:s/>20 70 <text:s/>90</text:span><text:span text:style-name="T41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41"><text:span text:style-name="T48">→</text:span><text:span text:style-name="T60"> </text:span><text:span text:style-name="T140">Heapify(3)</text:span><text:span text:style-name="T141">：</text:span><text:span text:style-name="T140">index 3 = 80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子節點：</text:span><text:span text:style-name="T48">index 6 = 70</text:span><text:span text:style-name="T59">，</text:span><text:span text:style-name="T48">index 7 = 90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3">Max Heap </text:span><text:span text:style-name="T54">要求父 ≥ 子</text:span><text:span text:style-name="T59">，但 </text:span><text:span text:style-name="T48">80 &lt; 90 → </text:span><text:span text:style-name="T59">違反！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80 </text:span><text:span text:style-name="T59">與 </text:span><text:span text:style-name="T48">90 </text:span><text:span text:style-name="T59">交換</text:span></text:p>
          </table:table-cell>
        </table:table-row>
        <table:table-row table:style-name="表格14.1">
          <table:table-cell table:style-name="表格14.A1" office:value-type="string">
            <text:p text:style-name="P4"/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交換後：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13"/>50</text:span><text:span text:style-name="T41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4" loext:marker-style-name="T41"><text:span text:style-name="T48"><text:s text:c="13"/>/ <text:s/>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8"/>30 <text:s text:c="3"/>90 <text:s text:c="5"/>← 90 </text:span><text:span text:style-name="T59">上來了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5"/>/ \ <text:s text:c="6"/>/ 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/>10 <text:s/>20 70 <text:s/>80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/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陣列：</text:span><text:span text:style-name="T48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80 </text:span><text:span text:style-name="T59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" loext:marker-style-name="T41"><text:span text:style-name="T48">→</text:span><text:span text:style-name="T140"> Heapify(2)</text:span><text:span text:style-name="T141">：</text:span><text:span text:style-name="T140">index 2 = 30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子節點：</text:span><text:span text:style-name="T48">index 4 = 10</text:span><text:span text:style-name="T59">，</text:span><text:span text:style-name="T48">index 5 = 20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1">30 ≥ 20 </text:span><text:span text:style-name="T52">且 </text:span><text:span text:style-name="T51">30 ≥ 10 → </text:span><text:span text:style-name="T52">符合 </text:span><text:span text:style-name="T51">Max Heap → </text:span><text:span text:style-name="T52">無需交換</text:span></text:p>
          </table:table-cell>
        </table:table-row>
        <table:table-row table:style-name="表格15.1">
          <table:table-cell table:style-name="表格15.A1" office:value-type="string">
            <text:p text:style-name="P4"/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11"/>5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8"/>30 <text:s text:c="3"/>9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7"/>/ \ <text:s text:c="2"/>/ 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5"/>10 <text:s/>20 70 <text:s/>8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/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陣列：</text:span><text:span text:style-name="T48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" loext:marker-style-name="T41"><text:span text:style-name="T48">→ </text:span><text:span text:style-name="T140">Heapify(1)</text:span><text:span text:style-name="T141">：</text:span><text:span text:style-name="T140">index 1 = 5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子節點：</text:span><text:span text:style-name="T48">index 2 = 30</text:span><text:span text:style-name="T59">，</text:span><text:span text:style-name="T48">index 3 = 9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88">較大子節點</text:span><text:span text:style-name="T59">為 </text:span><text:span text:style-name="T48">90 &gt; 50 → </text:span><text:span text:style-name="T49">50 </text:span><text:span text:style-name="T50">與 </text:span><text:span text:style-name="T49">90 </text:span><text:span text:style-name="T50">交換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第 </text:span><text:span text:style-name="T48">1 </text:span><text:span text:style-name="T59">步交換後：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8"/>30 <text:s text:c="3"/>50 <text:s text:c="5"/>← </text:span><text:span text:style-name="T55">50 </text:span><text:span text:style-name="T56">下沉到 </text:span><text:span text:style-name="T55">index 3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7"/>/ \ <text:s text:c="2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5"/>10 <text:s/>20 70 <text:s/>80</text:span><text:span text:style-name="T41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陣列：</text:span><text:span text:style-name="T48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174">50 </text:span><text:span text:style-name="T175">繼續下沉</text:span><text:span text:style-name="T59">：子節點 </text:span><text:span text:style-name="T48">index 6 = 70</text:span><text:span text:style-name="T59">，</text:span><text:span text:style-name="T48">index 7 = 8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88">較大子節點</text:span><text:span text:style-name="T59">為 </text:span><text:span text:style-name="T48">80 &gt; 50 → </text:span><text:span text:style-name="T49">50 </text:span><text:span text:style-name="T50">與 </text:span><text:span text:style-name="T49">80 </text:span><text:span text:style-name="T50">交換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第 </text:span><text:span text:style-name="T48">2 </text:span><text:span text:style-name="T59">步交換後：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8"/>30 <text:s text:c="3"/>80 <text:s text:c="5"/>← 80 </text:span><text:span text:style-name="T59">上來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7"/>/ \ <text:s text:c="6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4"/>10 <text:s/>20 70 <text:s/>50 <text:s text:c="3"/>← 50 </text:span><text:span text:style-name="T59">落到葉節點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50 </text:span><text:span text:style-name="T59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陣列：</text:span><text:span text:style-name="T48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" loext:marker-style-name="T41"><text:span text:style-name="T59">最終結果：</text:span><text:span text:style-name="T48">Max Heap ✓</text:span></text:p>
          </table:table-cell>
        </table:table-row>
        <table:table-row table:style-name="表格17.1">
          <table:table-cell table:style-name="表格17.A1" office:value-type="string">
            <text:p text:style-name="P4"/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8"/>30 <text:s text:c="3"/>8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4"/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59">陣列：</text:span><text:span text:style-name="T48">[90, 30, 80, 10, 20, 70, 50]</text:span></text:p>
          </table:table-cell>
        </table:table-row>
      </table:table>
      <text:p text:style-name="P1"/>
      <text:h text:style-name="P18" text:outline-level="2" loext:marker-style-name="T17"><text:span text:style-name="T26">★ </text:span><text:span text:style-name="T79">為何 </text:span><text:span text:style-name="T94">Bottom-Up Build Heap</text:span><text:span text:style-name="T95"> =</text:span><text:span text:style-name="T26"> </text:span><text:span text:style-name="T193">O(n)</text:span><text:span text:style-name="T18">？</text:span></text:h>
      <text:p text:style-name="P33" loext:marker-style-name="T29"><text:span text:style-name="T30">關鍵直覺：</text:span><text:span text:style-name="T148">每個節點 </text:span><text:span text:style-name="T151">Heapify </text:span><text:span text:style-name="T148">的代價 </text:span><text:span text:style-name="T151">= </text:span><text:span text:style-name="T148">它在樹中的「高度」</text:span><text:span text:style-name="T30">（</text:span><text:span text:style-name="T122">往下最多能走幾層</text:span><text:span text:style-name="T30">）。</text:span></text:p>
      <text:p text:style-name="P33" loext:marker-style-name="T29"><text:span text:style-name="T103">高度愈低的節點數量愈多，代價愈小；高度愈高的節點數量愈少，代價愈大</text:span><text:span text:style-name="T30">。</text:span><text:span text:style-name="T170">兩者相乘加總後收斂至 </text:span><text:span text:style-name="T177">O(n)</text:span><text:span text:style-name="T30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4">★ 為何 Build Heap 是 O(n)？</text:p>
            <text:p text:style-name="P4"/>
            <text:p text:style-name="P4">Build Heap 由下往上<text:span text:style-name="T182">對每個非葉節點執行 Heapify</text:span>。</text:p>
            <text:p text:style-name="P4"/>
            <text:p text:style-name="P4">以完全二元樹為例：</text:p>
            <text:p text:style-name="P4"/>
            <text:p text:style-name="P4"><text:span text:style-name="T195">高度0（葉節點）約有 </text:span><text:span text:style-name="T196">n/2</text:span><text:span text:style-name="T195"> 個</text:span>，<text:span text:style-name="T197">每個最多移動 0 步</text:span></text:p>
            <text:p text:style-name="P4"><text:span text:style-name="T195">高度1 約有 </text:span><text:span text:style-name="T196">n/4</text:span><text:span text:style-name="T195"> 個</text:span>，<text:span text:style-name="T197">每個最多移動 1 步</text:span></text:p>
            <text:p text:style-name="P4"><text:span text:style-name="T195">高度2 約有 </text:span><text:span text:style-name="T196">n/8</text:span><text:span text:style-name="T195"> 個</text:span>，<text:span text:style-name="T197">每個最多移動 2 步</text:span></text:p>
            <text:p text:style-name="P4"><text:span text:style-name="T195">高度3 約有 </text:span><text:span text:style-name="T196">n/16</text:span><text:span text:style-name="T195"> 個</text:span>，<text:span text:style-name="T197">每個最多移動 3 步</text:span></text:p>
            <text:p text:style-name="P4">...</text:p>
            <text:p text:style-name="P4"/>
            <text:p text:style-name="P4">因此總成本為：</text:p>
            <text:p text:style-name="P4"/>
            <text:p text:style-name="P4">T(n) ≈ (n/2)×0</text:p>
            <text:p text:style-name="P4"/>
            <text:p text:style-name="P4">* (n/4)×1</text:p>
            <text:p text:style-name="P4">* (n/8)×2</text:p>
            <text:p text:style-name="P4">* (n/16)×3</text:p>
            <text:p text:style-name="P4">* ...</text:p>
            <text:p text:style-name="P4"/>
            <text:p text:style-name="P4">觀察可知：</text:p>
            <text:p text:style-name="P4"/>
            <text:p text:style-name="P5">越往上，Heapify 可能移動的步數增加 1，</text:p>
            <text:p text:style-name="P4"><text:span text:style-name="T158">但節點數量卻減少一半</text:span>。</text:p>
            <text:p text:style-name="P4"/>
            <text:p text:style-name="P4">例如：</text:p>
            <text:p text:style-name="P4"/>
            <text:p text:style-name="P4">高度1： (<text:span text:style-name="T197">n/4</text:span>)×<text:span text:style-name="T195">1</text:span></text:p>
            <text:p text:style-name="P4">高度2： (<text:span text:style-name="T197">n/8</text:span>)×<text:span text:style-name="T195">2</text:span></text:p>
            <text:p text:style-name="P4">高度3： (<text:span text:style-name="T197">n/16</text:span>)×<text:span text:style-name="T195">3</text:span></text:p>
            <text:p text:style-name="P4"/>
            <text:p text:style-name="P4">可以看到<text:span text:style-name="T118">節點數減少的速度比成本增加的速度更快</text:span>。</text:p>
            <text:p text:style-name="P4"/>
            <text:p text:style-name="P4">因此<text:span text:style-name="T96">所有層的成本加總後不會達到 O(n log n)，而是 O(n)</text:span>。</text:p>
            <text:p text:style-name="P4"/>
            <text:p text:style-name="P4">結論：</text:p>
            <text:p text:style-name="P4"/>
            <text:p text:style-name="P4"><text:span text:style-name="T107">葉節點很多，但幾乎不用移動</text:span>；</text:p>
            <text:p text:style-name="P4"><text:span text:style-name="T159">根附近節點雖然較貴，但數量很少</text:span>。</text:p>
            <text:p text:style-name="P4"/>
            <text:p text:style-name="P4"><text:span text:style-name="T96">所以 </text:span><text:span text:style-name="T160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4"/>
          </table:table-cell>
        </table:table-row>
        <table:table-row table:style-name="表格18.1">
          <table:table-cell table:style-name="表格18.A1" office:value-type="string">
            <text:p text:style-name="P4" loext:marker-style-name="T41"><text:span text:style-name="T59">白話理解：</text:span><text:span text:style-name="T109">葉節點約佔一半，</text:span><text:span text:style-name="T110">Heapify </text:span><text:span text:style-name="T109">代價為 </text:span><text:span text:style-name="T110">0</text:span><text:span text:style-name="T59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4" loext:marker-style-name="T130"><text:span text:style-name="T131">往上每層節點數減半，代價只加 </text:span><text:span text:style-name="T130">1</text:span><text:span text:style-name="T131">。</text:span></text:p>
          </table:table-cell>
        </table:table-row>
        <table:table-row table:style-name="表格18.1">
          <table:table-cell table:style-name="表格18.A1" office:value-type="string">
            <text:p text:style-name="P4" loext:marker-style-name="T41"><text:span text:style-name="T191">整體工作量被大量葉節點的「零代價」攤平</text:span><text:span text:style-name="T59">，總代價 ∝ </text:span><text:span text:style-name="T48">n</text:span><text:span text:style-name="T59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2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2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2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 loext:marker-style-name="T132"><text:span text:style-name="T133">逐個 </text:span><text:span text:style-name="T132">Insert</text:span></text:p>
          </table:table-cell>
          <table:table-cell table:style-name="表格19.A2" office:value-type="string">
            <text:p text:style-name="P32" loext:marker-style-name="T41"><text:span text:style-name="T48">O(</text:span><text:span text:style-name="T49">n log n</text:span><text:span text:style-name="T48">)</text:span></text:p>
          </table:table-cell>
          <table:table-cell table:style-name="表格19.A2" office:value-type="string">
            <text:p text:style-name="P32" loext:marker-style-name="T41"><text:span text:style-name="T59">動態逐一加入</text:span><text:span text:style-name="T41"/></text:p>
          </table:table-cell>
        </table:table-row>
        <table:table-row table:style-name="表格19.1">
          <table:table-cell table:style-name="表格19.A3" office:value-type="string">
            <text:p text:style-name="P32" loext:marker-style-name="T132"><text:span text:style-name="T132">Bottom-Up Build Heap</text:span><text:span text:style-name="T132"/></text:p>
          </table:table-cell>
          <table:table-cell table:style-name="表格19.A3" office:value-type="string">
            <text:p text:style-name="P32" loext:marker-style-name="T41"><text:span text:style-name="T48">O(</text:span><text:span text:style-name="T49">n</text:span><text:span text:style-name="T48">) ★</text:span></text:p>
          </table:table-cell>
          <table:table-cell table:style-name="表格19.A3" office:value-type="string">
            <text:p text:style-name="P32" loext:marker-style-name="T41"><text:span text:style-name="T59">一次性建立</text:span><text:span text:style-name="T41"/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五、</text:span><text:span text:style-name="T10">Heap Sort</text:span><text:span text:style-name="T4">（堆積排序）</text:span></text:h>
      <text:p text:style-name="P33" loext:marker-style-name="T29"><text:span text:style-name="T47">Heap Sort </text:span><text:span text:style-name="T30">利用 </text:span><text:span text:style-name="T47">Heap </text:span><text:span text:style-name="T30">結構進行排序，分為兩個階段：</text:span></text:p>
      <text:p text:style-name="P1"/>
      <text:list xml:id="list3819085238" text:style-name="WWNum2">
        <text:list-item>
          <text:p text:style-name="P40" loext:marker-style-name="T29"><text:span text:style-name="T47">Phase 1</text:span><text:span text:style-name="T30">：</text:span><text:span text:style-name="T120">Build Heap</text:span><text:span text:style-name="T47"> — </text:span><text:span text:style-name="T198">將原始陣列建成 </text:span><text:span text:style-name="T199">Max Heap</text:span><text:span text:style-name="T30">，時間 </text:span><text:span text:style-name="T47">O(n)</text:span><text:span text:style-name="T30">。</text:span></text:p>
        </text:list-item>
        <text:list-item>
          <text:p text:style-name="P40" loext:marker-style-name="T29"><text:span text:style-name="T47">Phase 2</text:span><text:span text:style-name="T30">：</text:span><text:span text:style-name="T80">反覆 </text:span><text:span text:style-name="T92">Extract-Max</text:span><text:span text:style-name="T47"> — </text:span><text:span text:style-name="T64">取出 </text:span><text:span text:style-name="T71">Root</text:span><text:span text:style-name="T64">（最大值），放到陣列末端</text:span><text:span text:style-name="T30">，</text:span><text:span text:style-name="T32">再 </text:span><text:span text:style-name="T44">Heapify</text:span><text:span text:style-name="T30">，重複 </text:span><text:span text:style-name="T46">n-1</text:span><text:span text:style-name="T47"> </text:span><text:span text:style-name="T30">次，每次 </text:span><text:span text:style-name="T47">O(</text:span><text:span text:style-name="T151">log n</text:span><text:span text:style-name="T47">)</text:span><text:span text:style-name="T30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" loext:marker-style-name="T41"><text:span text:style-name="T48">Heap Sort </text:span><text:span text:style-name="T59">總時間 </text:span><text:span text:style-name="T48">= O(</text:span><text:span text:style-name="T49">n</text:span><text:span text:style-name="T48">) + O(</text:span><text:span text:style-name="T49">n log n</text:span><text:span text:style-name="T48">) = O(</text:span><text:span text:style-name="T145">n log n</text:span><text:span text:style-name="T48">)</text:span></text:p>
          </table:table-cell>
        </table:table-row>
        <table:table-row table:style-name="表格20.1">
          <table:table-cell table:style-name="表格20.A1" office:value-type="string">
            <text:p text:style-name="P4" loext:marker-style-name="T41"><text:span text:style-name="T59">空間複雜度 </text:span><text:span text:style-name="T48">= O(1)</text:span><text:span text:style-name="T59">（</text:span><text:span text:style-name="T48">In-place</text:span><text:span text:style-name="T59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4" loext:marker-style-name="T41"><text:span text:style-name="T59">穩定性 </text:span><text:span text:style-name="T48">= </text:span><text:span text:style-name="T59">不穩定（</text:span><text:span text:style-name="T48">Unstable</text:span><text:span text:style-name="T59">）</text:span></text:p>
          </table:table-cell>
        </table:table-row>
      </table:table>
      <text:p text:style-name="P1"/>
      <text:p text:style-name="P33" loext:marker-style-name="T29"><text:span text:style-name="T31">範例：對 </text:span><text:span text:style-name="T45">[4, 2, 7, 1, 5] </text:span><text:span text:style-name="T31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" loext:marker-style-name="T41"><text:span text:style-name="T48">Phase 1 — </text:span><text:span text:style-name="T132">Build Max Heap</text:span><text:span text:style-name="T59">：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59">原始：</text:span><text:span text:style-name="T48">[4, 2, 7, 1, 5]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9">n=5</text:span><text:span text:style-name="T59">，</text:span><text:span text:style-name="T99">最後非葉節點 </text:span><text:span text:style-name="T98">= </text:span><text:span text:style-name="T87">⌊5/2⌋ = 2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59">初始樹狀：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</text:span><text:span text:style-name="T87"><text:s/>2</text:span><text:span text:style-name="T48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5</text:span><text:span text:style-name="T41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128">Heapify(2)</text:span><text:span text:style-name="T59">：</text:span><text:span text:style-name="T49">2 </text:span><text:span text:style-name="T50">的子節點 </text:span><text:span text:style-name="T49">1, 5</text:span><text:span text:style-name="T59">；</text:span><text:span text:style-name="T145">5 &gt; 2 → </text:span><text:span text:style-name="T146">交換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6"/>5 <text:s text:c="2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128">Heapify(1)</text:span><text:span text:style-name="T59">：</text:span><text:span text:style-name="T49">4 </text:span><text:span text:style-name="T50">的子節點 </text:span><text:span text:style-name="T49">5, 7</text:span><text:span text:style-name="T59">；</text:span><text:span text:style-name="T145">7 &gt; 4 → </text:span><text:span text:style-name="T146">交換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6"/>5 <text:s text:c="2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Max Heap </text:span><text:span text:style-name="T59">完成：</text:span><text:span text:style-name="T48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" loext:marker-style-name="T41"><text:span text:style-name="T48">Phase 2 — </text:span><text:span text:style-name="T176">反覆</text:span><text:span text:style-name="T59"> </text:span><text:span text:style-name="T87">Extract-Max</text:span><text:span text:style-name="T59">：</text:span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1</text:span><text:span text:style-name="T59">：</text:span><text:span text:style-name="T61">取出 </text:span><text:span text:style-name="T62">Root=7</text:span><text:span text:style-name="T61">，末端 </text:span><text:span text:style-name="T62">2 </text:span><text:span text:style-name="T61">移到 </text:span><text:span text:style-name="T62">Root</text:span><text:span text:style-name="T59">，</text:span><text:span text:style-name="T53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5, 2, 4, 1 |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5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2 <text:s text:c="2"/>4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5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4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2</text:span><text:span text:style-name="T59">：</text:span><text:span text:style-name="T61">取出 </text:span><text:span text:style-name="T62">Root=5</text:span><text:span text:style-name="T61">，末端 </text:span><text:span text:style-name="T62">1 </text:span><text:span text:style-name="T61">移到 </text:span><text:span text:style-name="T62">Root</text:span><text:span text:style-name="T59">，</text:span><text:span text:style-name="T53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4, 2, 1 |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2 <text:s text:c="2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3</text:span><text:span text:style-name="T59">：</text:span><text:span text:style-name="T61">取出 </text:span><text:span text:style-name="T62">Root=4</text:span><text:span text:style-name="T61">，末端 </text:span><text:span text:style-name="T62">1 </text:span><text:span text:style-name="T61">移到 </text:span><text:span text:style-name="T62">Root</text:span><text:span text:style-name="T59">，</text:span><text:span text:style-name="T57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2, 1 |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2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7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4</text:span><text:span text:style-name="T59">：</text:span><text:span text:style-name="T61">取出 </text:span><text:span text:style-name="T62">Root=2</text:span><text:span text:style-name="T61">，末端 </text:span><text:span text:style-name="T62">1 </text:span><text:span text:style-name="T61">移到 </text:span><text:span text:style-name="T62">Root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1 | 2,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174"><text:span text:style-name="T175">最終排序（升冪）：</text:span><text:span text:style-name="T174">[1, 2, 4, 5, 7] ✓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3" loext:marker-style-name="T29"><text:span text:style-name="T71">Priority Queue</text:span><text:span text:style-name="T64">（優先佇列）</text:span><text:span text:style-name="T30">是</text:span><text:span text:style-name="T122">每次取出「優先值最高」元素的資料結構</text:span><text:span text:style-name="T30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32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2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6"><text:span text:style-name="T200">Extract-Max</text:span><text:span text:style-name="T202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2" loext:marker-style-name="T41"><text:span text:style-name="T133">排序好的</text:span><text:span text:style-name="T59">陣列</text:span></text:p>
          </table:table-cell>
          <table:table-cell table:style-name="表格23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23.A2" office:value-type="string">
            <text:p text:style-name="P32" loext:marker-style-name="T41"><text:span text:style-name="T48">O(1) <text:s/></text:span><text:span text:style-name="T59">取快插慢</text:span></text:p>
          </table:table-cell>
        </table:table-row>
        <table:table-row table:style-name="表格23.1">
          <table:table-cell table:style-name="表格23.A2" office:value-type="string">
            <text:p text:style-name="P32" loext:marker-style-name="T41"><text:span text:style-name="T133">未排序的</text:span><text:span text:style-name="T59">陣列</text:span></text:p>
          </table:table-cell>
          <table:table-cell table:style-name="表格23.A2" office:value-type="string">
            <text:p text:style-name="P32" loext:marker-style-name="T41"><text:span text:style-name="T48">O(1)</text:span><text:span text:style-name="T41"/></text:p>
          </table:table-cell>
          <table:table-cell table:style-name="表格23.A2" office:value-type="string">
            <text:p text:style-name="P32" loext:marker-style-name="T41"><text:span text:style-name="T48">O(n) <text:s/></text:span><text:span text:style-name="T59">插快取慢</text:span></text:p>
          </table:table-cell>
        </table:table-row>
        <table:table-row table:style-name="表格23.1">
          <table:table-cell table:style-name="表格23.A4" office:value-type="string">
            <text:p text:style-name="P32" loext:marker-style-name="T41"><text:span text:style-name="T48">Max Heap ★</text:span><text:span text:style-name="T41"/></text:p>
          </table:table-cell>
          <table:table-cell table:style-name="表格23.A4" office:value-type="string">
            <text:p text:style-name="P32" loext:marker-style-name="T145"><text:span text:style-name="T145">O(log n)</text:span><text:span text:style-name="T145"/></text:p>
          </table:table-cell>
          <table:table-cell table:style-name="表格23.A4" office:value-type="string">
            <text:p text:style-name="P32" loext:marker-style-name="T41"><text:span text:style-name="T128">O(log n)</text:span><text:span text:style-name="T48"> <text:s/></text:span><text:span text:style-name="T59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" loext:marker-style-name="T41"><text:span text:style-name="T48">💡 </text:span><text:span text:style-name="T59">考試重點：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87">Heap </text:span><text:span text:style-name="T88">是 </text:span><text:span text:style-name="T87">Priority Queue </text:span><text:span text:style-name="T88">最常見的實作</text:span><text:span text:style-name="T59">，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原因是 </text:span><text:span text:style-name="T145">Insert </text:span><text:span text:style-name="T146">和 </text:span><text:span text:style-name="T145">Extract </text:span><text:span text:style-name="T146">都是 </text:span><text:span text:style-name="T145">O(log n)</text:span><text:span text:style-name="T59">，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是</text:span><text:span text:style-name="T175">三種方案中最均衡的折衷解</text:span><text:span text:style-name="T59">。</text:span></text:p>
          </table:table-cell>
        </table:table-row>
        <table:table-row table:style-name="表格24.1">
          <table:table-cell table:style-name="表格24.A1" office:value-type="string">
            <text:p text:style-name="P4"/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應用場景：印表機緩衝（高優先文件先印）、作業系統 </text:span><text:span text:style-name="T48">CPU </text:span><text:span text:style-name="T59">排程。</text:span></text:p>
          </table:table-cell>
        </table:table-row>
      </table:table>
      <text:p text:style-name="P1"/>
      <text:p text:style-name="P1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" loext:marker-style-name="T41"><text:span text:style-name="T48">① </text:span><text:span text:style-name="T133">排序好的</text:span><text:span text:style-name="T59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10, 3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</text:span><text:span text:style-name="T59">挪動 </text:span><text:span text:style-name="T48">70, 80 </text:span><text:span text:style-name="T59">後</text:span><text:span text:style-name="T48">: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</text:span><text:span text:style-name="T53">50</text:span><text:span text:style-name="T48">, 70, 80] <text:s text:c="2"/>← </text:span><text:span text:style-name="T49">O(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Extract-Max</text:span><text:span text:style-name="T59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10, 30, 5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50, 70] <text:s text:c="2"/></text:span><text:span text:style-name="T59">取出 </text:span><text:span text:style-name="T48">80 <text:s text:c="2"/>←</text:span><text:span text:style-name="T49"> O(1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② </text:span><text:span text:style-name="T133">未排序的</text:span><text:span text:style-name="T59">陣列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80, 10, 30, 7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80, 10, 30, 70, 50] <text:s text:c="2"/>← </text:span><text:span text:style-name="T49">O(1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Extract-Max</text:span><text:span text:style-name="T59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80, 10, 30, 70, 5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</text:span><text:span text:style-name="T59">掃描</text:span><text:span text:style-name="T48">: 80? 10? 30? 70? 50? <text:s/>→ </text:span><text:span text:style-name="T59">找到 </text:span><text:span text:style-name="T48">80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70, 50] <text:s text:c="2"/></text:span><text:span text:style-name="T59">取出 </text:span><text:span text:style-name="T48">80 <text:s text:c="2"/>← </text:span><text:span text:style-name="T49">O(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③ Max Heap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放末端，</text:span><text:span text:style-name="T48">Bubble Up </text:span><text:span text:style-name="T59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80 <text:s text:c="16"/>8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/ <text:s/>\ <text:s text:c="15"/>/ <text:s text:c="2"/>\</text:span><text:span text:style-name="T41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4" loext:marker-style-name="T41"><text:span text:style-name="T48"><text:s text:c="6"/>70 <text:s text:c="2"/>30 <text:s text:c="3"/>→ <text:s/>7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6"/>/ <text:s text:c="18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4"/>10 <text:s text:c="14"/>10 <text:s text:c="2"/>50 ← </text:span><text:span text:style-name="T174">50 </text:span><text:span text:style-name="T175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61"/></text:span><text:span text:style-name="T145">O(log 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35" office:value-type="string">
            <text:p text:style-name="P4"><text:span text:style-name="T48">Extract-Max</text:span><text:span text:style-name="T59">：</text:span><text:span text:style-name="T67">取出 </text:span><text:span text:style-name="T68">Root=80</text:span><text:span text:style-name="T59">，</text:span><text:span text:style-name="T190">末端</text:span><text:span text:style-name="T156"> </text:span><text:span text:style-name="T157">50 </text:span><text:span text:style-name="T190">補位</text:span><text:span text:style-name="T59">，</text:span><text:span text:style-name="T48">Heapify </text:span><text:span text:style-name="T59">往下交換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80 <text:s text:c="16"/>50 <text:s text:c="17"/>7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8"/>/ <text:s text:c="2"/>\ <text:s text:c="15"/>/ <text:s text:c="2"/>\ <text:s text:c="16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"/>70 <text:s text:c="2"/>30 <text:s text:c="2"/>→ <text:s text:c="3"/>70 <text:s text:c="2"/>30 <text:s text:c="3"/>→ <text:s text:c="3"/>5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"/>/ <text:s text:c="2"/>\ <text:s text:c="15"/>/ <text:s text:c="20"/>/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10 <text:s text:c="2"/>50 <text:s text:c="9"/>10 <text:s text:c="18"/>1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3"/></text:span><text:span text:style-name="T59">取出 </text:span><text:span text:style-name="T48">80 <text:s text:c="5"/>50 </text:span><text:span text:style-name="T59">移到 </text:span><text:span text:style-name="T48">Root <text:s text:c="4"/>Heapify </text:span><text:span text:style-name="T59">完成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7"/></text:span><text:span text:style-name="T145">O(log n)</text:span></text:p>
          </table:table-cell>
        </table:table-row>
      </table:table>
      <text:p text:style-name="P1"/>
      <text:h text:style-name="P2" text:outline-level="1" loext:marker-style-name="T203"><text:span text:style-name="T204">七、</text:span><text:span text:style-name="T203">Interval Heap</text:span><text:span text:style-name="T204">（區間堆積）【</text:span><text:span text:style-name="T203">110</text:span><text:span text:style-name="T204">地</text:span><text:span text:style-name="T203">Q4</text:span><text:span text:style-name="T204">】</text:span></text:h>
      <text:h text:style-name="P3" text:outline-level="2" loext:marker-style-name="T20"><text:span text:style-name="T20">7-1 <text:s/></text:span><text:span text:style-name="T21">問題起源：</text:span><text:span text:style-name="T22">普通 </text:span><text:span text:style-name="T23">Heap</text:span><text:span text:style-name="T20"> </text:span><text:span text:style-name="T171">只能快速取一端</text:span></text:h>
      <text:p text:style-name="P7" loext:marker-style-name="T207"><text:span text:style-name="T208">回顧你已學過的 </text:span><text:span text:style-name="T207">Max Heap</text:span><text:span text:style-name="T208">：</text:span></text:p>
      <text:p text:style-name="P42" loext:marker-style-name="T225"><text:span text:style-name="T225"><text:s text:c="11"/>100 <text:s text:c="6"/>← </text:span><text:span text:style-name="T226">Root</text:span><text:span text:style-name="T225"> = 全域最大值（</text:span><text:span text:style-name="T226">O(1) 取得</text:span><text:span text:style-name="T225">）</text:span></text:p>
      <text:p text:style-name="P9"><text:s text:c="10"/>/ <text:s text:c="3"/>\</text:p>
      <text:p text:style-name="P8" loext:marker-style-name="T225"><text:span text:style-name="T225"><text:s text:c="8"/>90 <text:s text:c="5"/>80</text:span><text:span text:style-name="T225"/></text:p>
      <text:p text:style-name="P8" loext:marker-style-name="T225"><text:span text:style-name="T225"><text:s text:c="7"/>/ <text:s/>\</text:span><text:span text:style-name="T225"/></text:p>
      <text:p text:style-name="P8" loext:marker-style-name="T225"><text:span text:style-name="T225"><text:s text:c="6"/>70 <text:s text:c="2"/>60</text:span><text:span text:style-name="T225"/></text:p>
      <text:p text:style-name="P8"/>
      <text:p text:style-name="P8" loext:marker-style-name="T225"><text:span text:style-name="T225"><text:s text:c="2"/>Find-Max <text:s/>= O(1) <text:s/>直接</text:span><text:span text:style-name="T226">看 Root</text:span></text:p>
      <text:p text:style-name="P44" loext:marker-style-name="T225"><text:span text:style-name="T225"><text:s text:c="2"/></text:span><text:span text:style-name="T72">Find-Min <text:s/>= O(n)</text:span><text:span text:style-name="T225"> <text:s/></text:span><text:span text:style-name="T228">最小值藏在某個葉節點，不知在哪，</text:span><text:span text:style-name="T194">只能全掃</text:span></text:p>
      <text:p text:style-name="P11"/>
      <text:p text:style-name="P7" loext:marker-style-name="T207"><text:span text:style-name="T207">Max Heap </text:span><text:span text:style-name="T208">有一個致命弱點：</text:span></text:p>
      <text:list text:style-name="WWNum14">
        <text:list-item>
          <text:p text:style-name="P29" loext:marker-style-name="T207"><text:span text:style-name="T208">取最大值 → </text:span><text:span text:style-name="T207">O(1)</text:span><text:span text:style-name="T208">，非常快，因為 </text:span><text:span text:style-name="T207">Root </text:span><text:span text:style-name="T208">就是最大值。</text:span></text:p>
        </text:list-item>
        <text:list-item>
          <text:p text:style-name="P29" loext:marker-style-name="T207"><text:span text:style-name="T65">取最小值 → </text:span><text:span text:style-name="T66">O(n)</text:span><text:span text:style-name="T208">，</text:span><text:span text:style-name="T81">非常慢，因為最小值可能藏在任何一個葉節點，沒有規律可循。</text:span></text:p>
        </text:list-item>
      </text:list>
      <text:p text:style-name="P11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 loext:marker-style-name="T209"><text:span text:style-name="T209">❓ </text:span><text:span text:style-name="T210">想一想：最小值在哪裡？</text:span></text:p>
            <text:p text:style-name="P11" loext:marker-style-name="T218"><text:span text:style-name="T219">以上面的 </text:span><text:span text:style-name="T218">Max Heap </text:span><text:span text:style-name="T219">為例，最小值 </text:span><text:span text:style-name="T218">60 </text:span><text:span text:style-name="T219">藏在葉節點。</text:span></text:p>
            <text:p text:style-name="P46" loext:marker-style-name="T218"><text:span text:style-name="T219">如果樹有 </text:span><text:span text:style-name="T218">n </text:span><text:span text:style-name="T219">個節點，不掃到最後一層根本不知道最小值在哪。</text:span></text:p>
          </table:table-cell>
        </table:table-row>
      </table:table>
      <text:p text:style-name="P12"><text:soft-page-break/></text:p>
      <text:h text:style-name="P3" text:outline-level="2" loext:marker-style-name="T20"><text:span text:style-name="T20">7-2 <text:s/></text:span><text:span text:style-name="T22">現實需求</text:span><text:span text:style-name="T21">：</text:span><text:span text:style-name="T171">兩端都要快</text:span></text:h>
      <text:p text:style-name="P7" loext:marker-style-name="T207"><text:span text:style-name="T208">在</text:span><text:span text:style-name="T211">很多實際應用中</text:span><text:span text:style-name="T208">，我們</text:span><text:span text:style-name="T124">同時需要快速取出最大值和最小值</text:span><text:span text:style-name="T208">：</text:span></text:p>
      <text:p text:style-name="P11"/>
      <text:p text:style-name="P42" loext:marker-style-name="T225"><text:span text:style-name="T225"><text:s text:c="2"/>📈 股票交易系統：</text:span><text:span text:style-name="T225"/></text:p>
      <text:p text:style-name="P8" loext:marker-style-name="T225"><text:span text:style-name="T225"><text:s text:c="7"/>→ 最高價（最大值）O(1) 快速取得</text:span><text:span text:style-name="T225"/></text:p>
      <text:p text:style-name="P8" loext:marker-style-name="T225"><text:span text:style-name="T225"><text:s text:c="7"/>→ 最低價（最小值）O(1) 快速取得</text:span><text:span text:style-name="T225"/></text:p>
      <text:p text:style-name="P8"/>
      <text:p text:style-name="P8" loext:marker-style-name="T225"><text:span text:style-name="T225"><text:s text:c="2"/>🖥️ <text:s/>CPU 排程器（雙優先權模式）：</text:span><text:span text:style-name="T225"/></text:p>
      <text:p text:style-name="P8" loext:marker-style-name="T225"><text:span text:style-name="T225"><text:s text:c="7"/>→ 最高優先權工作 <text:s/>→ 優先執行</text:span><text:span text:style-name="T225"/></text:p>
      <text:p text:style-name="P8" loext:marker-style-name="T225"><text:span text:style-name="T225"><text:s text:c="7"/>→ 最低優先權工作 <text:s/>→ 必要時踢出讓位</text:span><text:span text:style-name="T225"/></text:p>
      <text:p text:style-name="P8"/>
      <text:p text:style-name="P8" loext:marker-style-name="T225"><text:span text:style-name="T225"><text:s text:c="2"/>❌ </text:span><text:span text:style-name="T226">普通 Max Heap</text:span><text:span text:style-name="T225"> 做不到：</text:span><text:span text:style-name="T152">找最小值要</text:span><text:span text:style-name="T194"> O(n)</text:span></text:p>
      <text:p text:style-name="P44" loext:marker-style-name="T225"><text:span text:style-name="T225"><text:s text:c="2"/>❌ </text:span><text:span text:style-name="T226">普通 Min Heap</text:span><text:span text:style-name="T225"> 做不到：</text:span><text:span text:style-name="T152">找最大值要</text:span><text:span text:style-name="T194"> O(n)</text:span></text:p>
      <text:p text:style-name="P11"/>
      <text:p text:style-name="P7" loext:marker-style-name="T207"><text:span text:style-name="T208">這類需求稱為 </text:span><text:span text:style-name="T207">Double-Ended Priority Queue</text:span><text:span text:style-name="T208">（</text:span><text:span text:style-name="T207">DEPQ</text:span><text:span text:style-name="T208">，</text:span><text:span text:style-name="T104">雙端優先佇列</text:span><text:span text:style-name="T208">），</text:span><text:span text:style-name="T81">目標是</text:span><text:span text:style-name="T208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1" loext:marker-style-name="T209"><text:span text:style-name="T209">Extract-Min</text:span><text:span text:style-name="T210">（</text:span><text:span text:style-name="T172">取出最小值</text:span><text:span text:style-name="T210">）</text:span><text:span text:style-name="T209">= </text:span><text:span text:style-name="T173">O(log n)</text:span></text:p>
            <text:p text:style-name="P46" loext:marker-style-name="T209"><text:span text:style-name="T209">Extract-Max</text:span><text:span text:style-name="T210">（</text:span><text:span text:style-name="T172">取出最大值</text:span><text:span text:style-name="T210">）</text:span><text:span text:style-name="T209">= </text:span><text:span text:style-name="T173">O(log n)</text:span></text:p>
          </table:table-cell>
        </table:table-row>
      </table:table>
      <text:p text:style-name="P12"/>
      <text:h text:style-name="P3" text:outline-level="2" loext:marker-style-name="T20"><text:span text:style-name="T20">7-3 <text:s/>Interval Heap </text:span><text:span text:style-name="T21">的核心設計</text:span></text:h>
      <text:p text:style-name="P7" loext:marker-style-name="T207"><text:span text:style-name="T213">Interval Heap </text:span><text:span text:style-name="T214">的靈感</text:span><text:span text:style-name="T208">：</text:span><text:span text:style-name="T81">把 </text:span><text:span text:style-name="T82">Min Heap </text:span><text:span text:style-name="T81">和 </text:span><text:span text:style-name="T82">Max Heap</text:span><text:span text:style-name="T185">「疊」在同一棵樹上</text:span><text:span text:style-name="T208">。</text:span></text:p>
      <text:p text:style-name="P7" loext:marker-style-name="T207"><text:span text:style-name="T220">具體做法：</text:span><text:span text:style-name="T149">每個節點不再存一個值</text:span><text:span text:style-name="T208">，</text:span><text:span text:style-name="T124">改成存一個「區間」</text:span><text:span text:style-name="T125">[min_val, max_val]</text:span><text:span text:style-name="T208">：</text:span></text:p>
      <text:p text:style-name="P42" loext:marker-style-name="T225"><text:span text:style-name="T225"><text:s text:c="2"/></text:span><text:span text:style-name="T227">普通</text:span><text:span text:style-name="T225"> Heap 節點： <text:s text:c="9"/>Interval Heap 節點：</text:span></text:p>
      <text:p text:style-name="P8" loext:marker-style-name="T225"><text:span text:style-name="T225"><text:s text:c="7"/></text:span><text:span text:style-name="T226">80</text:span><text:span text:style-name="T225"> <text:s text:c="23"/></text:span><text:span text:style-name="T226">[20, 80]</text:span></text:p>
      <text:p text:style-name="P9"><text:s text:c="34"/>左值 <text:s/>右值</text:p>
      <text:p text:style-name="P8" loext:marker-style-name="T225"><text:span text:style-name="T225"><text:s text:c="30"/>（小的） <text:s/>（大的）</text:span><text:span text:style-name="T225"/></text:p>
      <text:p text:style-name="P8"/>
      <text:p text:style-name="P44" loext:marker-style-name="T225"><text:span text:style-name="T225"><text:s text:c="2"/>規則：</text:span><text:span text:style-name="T230">每個節點的 左值 ≤ 右值</text:span><text:span text:style-name="T231"> </text:span><text:span text:style-name="T225">（必須成立）</text:span></text:p>
      <text:p text:style-name="P11"/>
      <text:p text:style-name="P7" loext:marker-style-name="T207"><text:span text:style-name="T215">兩個 </text:span><text:span text:style-name="T216">Heap </text:span><text:span text:style-name="T215">的同時維護</text:span><text:span text:style-name="T208">：</text:span></text:p>
      <text:list text:continue-numbering="true" text:style-name="WWNum14">
        <text:list-item>
          <text:p text:style-name="P29" loext:marker-style-name="T207"><text:span text:style-name="T211">所有節點的</text:span><text:span text:style-name="T112">左</text:span><text:span text:style-name="T211">值（</text:span><text:span text:style-name="T212">min </text:span><text:span text:style-name="T211">端）</text:span><text:span text:style-name="T208">— 自上而下形成一個 </text:span><text:span text:style-name="T113">Min Heap</text:span></text:p>
        </text:list-item>
        <text:list-item>
          <text:p text:style-name="P29" loext:marker-style-name="T207"><text:span text:style-name="T211">所有節點的</text:span><text:span text:style-name="T136">右</text:span><text:span text:style-name="T211">值（</text:span><text:span text:style-name="T212">max </text:span><text:span text:style-name="T211">端</text:span><text:span text:style-name="T208">）— 自上而下形成一個 </text:span><text:span text:style-name="T137">Max Heap</text:span></text:p>
        </text:list-item>
      </text:list>
      <text:p text:style-name="P11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" loext:marker-style-name="T209"><text:span text:style-name="T209">Interval Heap = </text:span><text:span text:style-name="T114">Min Heap</text:span><text:span text:style-name="T115">（左值）</text:span><text:span text:style-name="T209">+</text:span><text:span text:style-name="T137"> Max Heap</text:span><text:span text:style-name="T138">（右值）</text:span><text:span text:style-name="T232">同時疊在一棵樹上</text:span></text:p>
          </table:table-cell>
        </table:table-row>
      </table:table>
      <text:p text:style-name="P12"/>
      <text:h text:style-name="P3" text:outline-level="2" loext:marker-style-name="T20"><text:span text:style-name="T20">7-4 <text:s/></text:span><text:span text:style-name="T21">整棵樹的結構解析</text:span></text:h>
      <text:p text:style-name="P42" loext:marker-style-name="T225"><text:span text:style-name="T225"><text:s text:c="14"/>[</text:span><text:span text:style-name="T227">10</text:span><text:span text:style-name="T225">, </text:span><text:span text:style-name="T134">100</text:span><text:span text:style-name="T225">] <text:s text:c="9"/>← Root</text:span></text:p>
      <text:p text:style-name="P8" loext:marker-style-name="T225"><text:span text:style-name="T225"><text:s text:c="13"/>/ <text:s text:c="9"/>\</text:span><text:span text:style-name="T225"/></text:p>
      <text:p text:style-name="P44" loext:marker-style-name="T225"><text:soft-page-break/><text:span text:style-name="T225"><text:s text:c="8"/>[</text:span><text:span text:style-name="T227">20</text:span><text:span text:style-name="T225">, </text:span><text:span text:style-name="T134">80</text:span><text:span text:style-name="T225">] <text:s text:c="5"/>[</text:span><text:span text:style-name="T227">30</text:span><text:span text:style-name="T225">, </text:span><text:span text:style-name="T134">90</text:span><text:span text:style-name="T225">]</text:span></text:p>
      <text:p text:style-name="P11"/>
      <text:p text:style-name="P7" loext:marker-style-name="T207"><text:span text:style-name="T208">拆開來看左右兩個 </text:span><text:span text:style-name="T207">Heap</text:span><text:span text:style-name="T208">：</text:span></text:p>
      <text:p text:style-name="P42" loext:marker-style-name="T225"><text:span text:style-name="T225"><text:s text:c="2"/></text:span><text:span text:style-name="T229">左值（min 端）形成 Min Heap</text:span><text:span text:style-name="T225">： <text:s text:c="2"/></text:span><text:span text:style-name="T178">右值（max 端）形成 Max Heap</text:span><text:span text:style-name="T225">：</text:span></text:p>
      <text:p text:style-name="P8"/>
      <text:p text:style-name="P8" loext:marker-style-name="T225"><text:span text:style-name="T225"><text:s text:c="10"/>10 <text:s text:c="30"/>100</text:span><text:span text:style-name="T225"/></text:p>
      <text:p text:style-name="P8" loext:marker-style-name="T225"><text:span text:style-name="T225"><text:s text:c="9"/>/ <text:s/>\ <text:s text:c="28"/>/ <text:s text:c="3"/>\</text:span><text:span text:style-name="T225"/></text:p>
      <text:p text:style-name="P8" loext:marker-style-name="T225"><text:span text:style-name="T225"><text:s text:c="8"/>20 <text:s/>30 <text:s text:c="26"/>80 <text:s text:c="4"/>90</text:span><text:span text:style-name="T225"/></text:p>
      <text:p text:style-name="P8"/>
      <text:p text:style-name="P44" loext:marker-style-name="T225"><text:span text:style-name="T225"><text:s text:c="2"/>驗證 Min Heap：10 ≤ 20 ✓ <text:s/>10 ≤ 30 ✓ <text:s text:c="2"/>驗證 Max Heap：100 ≥ 80 ✓ <text:s/>100 ≥ 90 ✓</text:span><text:span text:style-name="T225"/></text:p>
      <text:p text:style-name="P11"/>
      <text:p text:style-name="P7" loext:marker-style-name="T207"><text:span text:style-name="T208">因此：</text:span><text:span text:style-name="T207"/></text:p>
      <text:list text:continue-numbering="true" text:style-name="WWNum14">
        <text:list-item>
          <text:p text:style-name="P29" loext:marker-style-name="T207"><text:span text:style-name="T212">Root </text:span><text:span text:style-name="T211">的</text:span><text:span text:style-name="T112">左</text:span><text:span text:style-name="T211">值</text:span><text:span text:style-name="T208"> </text:span><text:span text:style-name="T207">= </text:span><text:span text:style-name="T116">Min</text:span><text:span text:style-name="T207"> Heap </text:span><text:span text:style-name="T208">的 </text:span><text:span text:style-name="T207">Root = </text:span><text:span text:style-name="T233">全域最小值</text:span><text:span text:style-name="T208"> </text:span><text:span text:style-name="T207">= 10 <text:s/>→</text:span><text:span text:style-name="T163"> <text:s/>Find-Min = O(1)</text:span></text:p>
        </text:list-item>
        <text:list-item>
          <text:p text:style-name="P29" loext:marker-style-name="T207"><text:span text:style-name="T212">Root </text:span><text:span text:style-name="T211">的</text:span><text:span text:style-name="T136">右</text:span><text:span text:style-name="T211">值</text:span><text:span text:style-name="T208"> </text:span><text:span text:style-name="T207">= </text:span><text:span text:style-name="T139">Max</text:span><text:span text:style-name="T207"> Heap </text:span><text:span text:style-name="T208">的 </text:span><text:span text:style-name="T207">Root = </text:span><text:span text:style-name="T234">全域最大值</text:span><text:span text:style-name="T208"> </text:span><text:span text:style-name="T207">= 100 <text:s/>→ </text:span><text:span text:style-name="T163"><text:s/>Find-Max = O(1)</text:span></text:p>
        </text:list-item>
      </text:list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1" loext:marker-style-name="T209"><text:span text:style-name="T209">🎯 Interval Heap </text:span><text:span text:style-name="T210">的核心價值</text:span></text:p>
            <text:p text:style-name="P11" loext:marker-style-name="T218"><text:span text:style-name="T126">Root </text:span><text:span text:style-name="T127">節點</text:span><text:span text:style-name="T172">同時持有全域最小值（左值）和全域最大值（右值）</text:span><text:span text:style-name="T219">，</text:span></text:p>
            <text:p text:style-name="P46" loext:marker-style-name="T218"><text:span text:style-name="T217">無論取哪一端</text:span><text:span text:style-name="T219">，</text:span><text:span text:style-name="T81">都能 </text:span><text:span text:style-name="T82">O(1) </text:span><text:span text:style-name="T81">找到、</text:span><text:span text:style-name="T164">O(log n) </text:span><text:span text:style-name="T165">取出</text:span><text:span text:style-name="T81">。</text:span></text:p>
          </table:table-cell>
        </table:table-row>
      </table:table>
      <text:p text:style-name="P12"/>
      <text:h text:style-name="P18" text:outline-level="2" loext:marker-style-name="T17"><text:span text:style-name="T18">7-4.5 <text:s/></text:span><text:span text:style-name="T150">Find 找到 vs. Extract 取出</text:span><text:span text:style-name="T18">：</text:span><text:span text:style-name="T186">為何一個 O(1)、一個 O(log n)</text:span><text:span text:style-name="T18">？</text:span></text:h>
      <text:p text:style-name="P33" loext:marker-style-name="T235"><text:span text:style-name="T236">這是很多人第一次接觸 Heap 時最容易混淆的地方。關鍵在於：</text:span><text:span text:style-name="T106">「找到（Find/Peek）」和「取出（Extract/Delete）」是完全不同的兩件事。</text:span></text:p>
      <text:p text:style-name="P12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4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11"/>100 <text:s text:c="2"/>← Root = 全域最大值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10"/>/ <text:s text:c="2"/>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8"/>90 <text:s text:c="3"/>8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5"/>70 <text:s/>6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Find-Max（找最大值）= O(1)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2"/>→ 直接讀 Root，什麼都不用動。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Extract-Max（取出最大值）= O(log n)</text:span><text:span text:style-name="T41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4" loext:marker-style-name="T41"><text:span text:style-name="T48"><text:s text:c="2"/>→ </text:span><text:span text:style-name="T174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4"/>1. </text:span><text:span text:style-name="T237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4"/>2. </text:span><text:span text:style-name="T142">Heap Property（父 ≥ 子）不能違反</text:span></text:p>
          </table:table-cell>
        </table:table-row>
      </table:table>
      <text:p text:style-name="P12"/>
      <text:p text:style-name="P33" loext:marker-style-name="T235"><text:span text:style-name="T93">「取出」的代價遠比「找到」高，是因為</text:span><text:span text:style-name="T188">刪除 Root 後必須完整修復整棵樹的結構。</text:span><text:span text:style-name="T236">流程如下：</text:span></text:p>
      <text:p text:style-name="P12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4" loext:marker-style-name="T41"><text:span text:style-name="T48">Extract-Max 完整流程（以上面的 Max Heap 為例）：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1：取出 Root = 10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2：把最後元素（葉節點最右端）60 搬到 Root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60 <text:s text:c="2"/>← 60 補位後，Heap Property 壞掉了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9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3：60 &lt; 90，違反 Max Heap → 與較大子節點 90 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6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4：60 &lt; 70，仍違反 → 再往下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70 <text:s/>80</text:span><text:span text:style-name="T41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60 <text:s text:c="2"/>← 60 最終落到葉節點，停止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這個「一路往下修正」的過程稱為 Heapify Down（向下沉）。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144">最壞情況需走完整棵樹的高度 h = log₂n</text:span><text:span text:style-name="T48">，因此 </text:span><text:span text:style-name="T189">O(log n)</text:span><text:span text:style-name="T48">。</text:span></text:p>
          </table:table-cell>
        </table:table-row>
      </table:table>
      <text:p text:style-name="P12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4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4"/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2"/>Find <text:s text:c="2"/>= 看書架最上面那本書 → O(1)，就在眼前，看一眼即可。</text:span><text:span text:style-name="T41"/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2"/></text:span><text:span text:style-name="T49">Extract</text:span><text:span text:style-name="T48"> = </text:span><text:span text:style-name="T154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11"/></text:span><text:span text:style-name="T174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12"/></text:span><text:span text:style-name="T87">這個「整理」的工作量才是 O(log n) 的真正來源。</text:span></text:p>
          </table:table-cell>
        </table:table-row>
      </table:table>
      <text:p text:style-name="P12"/>
      <text:h text:style-name="P18" text:outline-level="2" loext:marker-style-name="T17"><text:span text:style-name="T18">7-4.6 <text:s/>Interval Heap 的 Extract-Min 與 Extract-Max 完整示範</text:span><text:span text:style-name="T17"/></text:h>
      <text:p text:style-name="P33" loext:marker-style-name="T235"><text:span text:style-name="T236">Interval Heap 的 Extract 操作，本質上就是普通 Heap 的 Heapify Down，只是同時維護 Min 端和 Max 端兩條性質。以下用同一棵初始樹，分別展示兩種操作。</text:span><text:span text:style-name="T235"/></text:p>
      <text:p text:style-name="P12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4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13"/>[10, 100] <text:s text:c="6"/>← Root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12"/>/ <text:s text:c="9"/>\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7"/>[20, 80] <text:s text:c="5"/>[30, 90]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左值（min 端）形成 Min Heap： <text:s/>10 ≤ 20，10 ≤ 3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右值（max 端）形成 Max Heap： <text:s/>100 ≥ 80，100 ≥ 9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全域最小值 = Root 左值 = 10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全域最大值 = Root 右值 = 100</text:span><text:span text:style-name="T41"/></text:p>
          </table:table-cell>
        </table:table-row>
      </table:table>
      <text:p text:style-name="P12"/>
      <text:h text:style-name="P18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4" loext:marker-style-name="T41"><text:span text:style-name="T48">Step 1：</text:span><text:span text:style-name="T240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4" loext:marker-style-name="T41"><text:span text:style-name="T48"><text:s text:c="8"/>Root 左側空洞，需要補位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 ?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 <text:s text:c="7"/>\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20, 80] <text:s text:c="3"/>[30, 9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2：補位規則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把最後節點（[30, 90]）整體移除，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取其 min 端（30）補到 Root 的左值位置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（補 min 端修的是 Min Heap；補 max 端修的是 Max Heap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3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3：檢查 Min Heap 性質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Root min = 30，Child min = 20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</text:span><text:span text:style-name="T110">30 &gt; 20 → 違反 Min Heap（父 ≤ 子）</text:span><text:span text:style-name="T48">→ </text:span><text:span text:style-name="T90">交換 min 端</text:span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4：Heapify Down（min 端下沉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20 ≤ 30 → 合法，停止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4" loext:marker-style-name="T41"><text:span text:style-name="T48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成功取出最小值 10，</text:span><text:span text:style-name="T174">Min Heap 與 Max Heap 性質皆完整恢復</text:span><text:span text:style-name="T48">。</text:span></text:p>
          </table:table-cell>
        </table:table-row>
      </table:table>
      <text:p text:style-name="P12"/>
      <text:h text:style-name="P18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4" loext:marker-style-name="T41"><text:span text:style-name="T48">使用同一棵初始樹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3"/>[10, 10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2"/>/ <text:s text:c="9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7"/>[20, 80] <text:s text:c="5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1：</text:span><text:span text:style-name="T240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Root 右側空洞，需要補位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<text:s/>? 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 <text:s text:c="7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 <text:s text:c="3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2：補位規則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把最後節點（[30, 90]）整體移除，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取其 max 端（90）補到 Root 的右值位置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3：檢查 Max Heap 性質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Root max = 90，Child max = 80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90 ≥ 80 → 符合 Max Heap → 無需交換，停止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ext:soft-page-break/>
        <table:table-row table:style-name="表格35.1">
          <table:table-cell table:style-name="表格35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成功取出最大值 100，</text:span><text:span text:style-name="T174">結構完整</text:span><text:span text:style-name="T48">。</text:span></text:p>
          </table:table-cell>
        </table:table-row>
      </table:table>
      <text:p text:style-name="P12"/>
      <text:h text:style-name="P18" text:outline-level="2" loext:marker-style-name="T17"><text:span text:style-name="T18"><text:s text:c="2"/>三、Extract-Max 的下沉範例（需多次 Heapify）</text:span><text:span text:style-name="T17"/></text:h>
      <text:p text:style-name="P33" loext:marker-style-name="T235"><text:span text:style-name="T236">上例的 Max Heap 恰好不需要下沉。以下補充一個「確實需要多次下沉」的案例，更能體現 O(log n) 的代價：</text:span><text:span text:style-name="T235"/></text:p>
      <text:p text:style-name="P12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4" loext:marker-style-name="T41"><text:span text:style-name="T48">初始 Interval Heap（5 個節點）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10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 <text:s text:c="6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 <text:s/>[5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1：取出 Root max = 10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2：最後節點 [50, 70] 移除，取其 max 端 70 補到 Root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3：Root max = 70，子節點 max：左=95，右=9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較大子節點 max = 95 &gt; 70 → 違反 Max Heap → 70 與 9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ext:soft-page-break/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70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4：[20, 70] 的 max = 70，子節點 max：左=85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85 &gt; 70 → 仍違反 → 70 與 8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5：[40, 70] 已是葉節點 → 停止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全域最大值已更新為 95。</text:span><text:span text:style-name="T41"/></text:p>
          </table:table-cell>
        </table:table-row>
      </table:table>
      <text:p text:style-name="P12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4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4"/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<text:s text:c="2"/>操作 <text:s text:c="14"/>Interval Heap <text:s text:c="3"/>普通 Max Heap <text:s text:c="3"/>普通 Min Heap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<text:s text:c="2"/>Find-Min（找最小） O(1) <text:s/>★ <text:s text:c="9"/>O(n) <text:s text:c="12"/>O(1)</text:span><text:span text:style-name="T41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4" loext:marker-style-name="T41"><text:span text:style-name="T48"><text:s text:c="2"/>Find-Max（找最大） O(1) <text:s/>★ <text:s text:c="9"/>O(1) <text:s text:c="12"/>O(n)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13"><text:span text:style-name="T201"><text:s text:c="2"/>Extract-Min <text:s text:c="7"/>O(log n) <text:s text:c="9"/></text:span><text:span text:style-name="T238">O(n) </text:span><text:span text:style-name="T201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3"><text:span text:style-name="T201"><text:s text:c="2"/>Extract-Max <text:s text:c="7"/>O(log n) <text:s text:c="9"/>O(log n) <text:s text:c="8"/></text:span><text:span text:style-name="T239">O(n)</text:span></text:p>
          </table:table-cell>
        </table:table-row>
        <table:table-row table:style-name="表格37.1">
          <table:table-cell table:style-name="表格37.A1" office:value-type="string">
            <text:p text:style-name="P4"/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87">Interval Heap 的兩個 Extract 都是 O(log n)</text:span><text:span text:style-name="T48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Find 快是因為答案就在 Root；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192">Extract 要 O(log n) </text:span><text:span text:style-name="T48">是因為</text:span><text:span text:style-name="T189">刪除後必須 Heapify Down 修復結構</text:span><text:span text:style-name="T48">。</text:span></text:p>
          </table:table-cell>
        </table:table-row>
      </table:table>
      <text:p text:style-name="P12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4" loext:marker-style-name="T41"><text:span text:style-name="T48">⚠️ <text:s/>常見混淆整理：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「Root 節點同時持有全域最小與最大值，所以 O(1) 找到。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→ 正確。Find = 讀一個值，完全不修改樹，當然 O(1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「Find 都 O(1) 了，Extract 怎麼還要 O(log n)？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→ 因為</text:span><text:span text:style-name="T145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<text:s text:c="2"/>刪除後最後元素補位，再 Heapify Down 重建性質，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<text:s text:c="2"/>最壞走 log n 層 → O(log n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記法：Find = 看，不動樹 → O(1)。</text:span><text:span text:style-name="T174">Extract = 拿走，要整理 → O(log n)</text:span><text:span text:style-name="T48">。</text:span></text:p>
          </table:table-cell>
        </table:table-row>
      </table:table>
      <text:p text:style-name="P12"/>
      <text:p text:style-name="P12"/>
      <text:h text:style-name="P3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41"><text:span text:style-name="T242">操作</text:span><text:span text:style-name="T241"/></text:p>
          </table:table-cell>
          <table:table-cell table:style-name="表格39.A1" office:value-type="string">
            <text:p text:style-name="Standard" loext:marker-style-name="T241"><text:span text:style-name="T241">Interval Heap</text:span><text:span text:style-name="T241"/></text:p>
          </table:table-cell>
          <table:table-cell table:style-name="表格39.A1" office:value-type="string">
            <text:p text:style-name="Standard" loext:marker-style-name="T241"><text:span text:style-name="T242">普通 </text:span><text:span text:style-name="T241">Max Heap</text:span></text:p>
          </table:table-cell>
          <table:table-cell table:style-name="表格39.A1" office:value-type="string">
            <text:p text:style-name="Standard" loext:marker-style-name="T241"><text:span text:style-name="T242">普通 </text:span><text:span text:style-name="T241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3"><text:span text:style-name="T223">Find-Min</text:span><text:span text:style-name="T224">（找最小值）</text:span></text:p>
          </table:table-cell>
          <table:table-cell table:style-name="表格39.A2" office:value-type="string">
            <text:p text:style-name="Standard" loext:marker-style-name="T223"><text:span text:style-name="T223">O(1) ★</text:span><text:span text:style-name="T223"/></text:p>
          </table:table-cell>
          <table:table-cell table:style-name="表格39.A2" office:value-type="string">
            <text:p text:style-name="Standard" loext:marker-style-name="T223"><text:span text:style-name="T223">O(n)</text:span><text:span text:style-name="T223"/></text:p>
          </table:table-cell>
          <table:table-cell table:style-name="表格39.A2" office:value-type="string">
            <text:p text:style-name="Standard" loext:marker-style-name="T223"><text:span text:style-name="T223">O(1)</text:span><text:span text:style-name="T223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3"><text:span text:style-name="T223">Find-Max</text:span><text:span text:style-name="T224">（找最大值）</text:span></text:p>
          </table:table-cell>
          <table:table-cell table:style-name="表格39.A3" office:value-type="string">
            <text:p text:style-name="Standard" loext:marker-style-name="T223"><text:span text:style-name="T223">O(1) ★</text:span><text:span text:style-name="T223"/></text:p>
          </table:table-cell>
          <table:table-cell table:style-name="表格39.A3" office:value-type="string">
            <text:p text:style-name="Standard" loext:marker-style-name="T223"><text:span text:style-name="T223">O(1)</text:span><text:span text:style-name="T223"/></text:p>
          </table:table-cell>
          <table:table-cell table:style-name="表格39.A3" office:value-type="string">
            <text:p text:style-name="Standard" loext:marker-style-name="T223"><text:span text:style-name="T223">O(n)</text:span><text:span text:style-name="T223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3"><text:span text:style-name="T223">Extract-Min</text:span><text:span text:style-name="T224">（取出最小）</text:span></text:p>
          </table:table-cell>
          <table:table-cell table:style-name="表格39.A2" office:value-type="string">
            <text:p text:style-name="Standard" loext:marker-style-name="T223"><text:span text:style-name="T223">O(log n) ★</text:span><text:span text:style-name="T223"/></text:p>
          </table:table-cell>
          <table:table-cell table:style-name="表格39.A2" office:value-type="string">
            <text:p text:style-name="Standard" loext:marker-style-name="T223"><text:span text:style-name="T223">O(n)</text:span><text:span text:style-name="T223"/></text:p>
          </table:table-cell>
          <table:table-cell table:style-name="表格39.A2" office:value-type="string">
            <text:p text:style-name="Standard" loext:marker-style-name="T223"><text:span text:style-name="T223">O(log n)</text:span><text:span text:style-name="T223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3"><text:span text:style-name="T223">Extract-Max</text:span><text:span text:style-name="T224">（取出最大）</text:span></text:p>
          </table:table-cell>
          <table:table-cell table:style-name="表格39.A3" office:value-type="string">
            <text:p text:style-name="Standard" loext:marker-style-name="T223"><text:span text:style-name="T223">O(log n) ★</text:span><text:span text:style-name="T223"/></text:p>
          </table:table-cell>
          <table:table-cell table:style-name="表格39.A3" office:value-type="string">
            <text:p text:style-name="Standard" loext:marker-style-name="T223"><text:span text:style-name="T223">O(log n)</text:span><text:span text:style-name="T223"/></text:p>
          </table:table-cell>
          <table:table-cell table:style-name="表格39.A3" office:value-type="string">
            <text:p text:style-name="Standard" loext:marker-style-name="T223"><text:span text:style-name="T223">O(n)</text:span><text:span text:style-name="T223"/></text:p>
          </table:table-cell>
        </table:table-row>
      </table:table>
      <text:p text:style-name="P7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11" loext:marker-style-name="T209"><text:span text:style-name="T209">⚠️ <text:s/></text:span><text:span text:style-name="T210">普通 </text:span><text:span text:style-name="T209">Min/Max Heap </text:span><text:span text:style-name="T210">各有盲點：</text:span></text:p>
            <text:p text:style-name="P11" loext:marker-style-name="T218"><text:span text:style-name="T65">普通 </text:span><text:span text:style-name="T66">Max Heap </text:span><text:span text:style-name="T65">找最小值 </text:span><text:span text:style-name="T219">→ </text:span><text:span text:style-name="T212">O(n)</text:span><text:span text:style-name="T211">（要掃整棵樹）</text:span></text:p>
            <text:p text:style-name="P11" loext:marker-style-name="T218"><text:span text:style-name="T75">普通 </text:span><text:span text:style-name="T76">Min Heap </text:span><text:span text:style-name="T75">找最大值 </text:span><text:span text:style-name="T219">→ </text:span><text:span text:style-name="T212">O(n)</text:span><text:span text:style-name="T211">（同理）</text:span></text:p>
            <text:p text:style-name="P46" loext:marker-style-name="T218"><text:span text:style-name="T82">Interval Heap </text:span><text:span text:style-name="T81">解決此問題，兩端操作都達到 </text:span><text:span text:style-name="T82">O(log n)</text:span><text:span text:style-name="T219">，這是其最大優勢。</text:span></text:p>
          </table:table-cell>
        </table:table-row>
      </table:table>
      <text:p text:style-name="P12"/>
      <text:h text:style-name="P3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7" loext:marker-style-name="T207"><text:span text:style-name="T208">以下示範將數字 </text:span><text:span text:style-name="T207">5 </text:span><text:span text:style-name="T208">插入含 </text:span><text:span text:style-name="T207">{10, 100}, {20, 80}, {30, 90} </text:span><text:span text:style-name="T208">的 </text:span><text:span text:style-name="T207">Interval Heap</text:span><text:span text:style-name="T208">：</text:span></text:p>
      <text:p text:style-name="P42" loext:marker-style-name="T225"><text:span text:style-name="T225">初始： <text:s text:c="10"/>[10, 100]</text:span><text:span text:style-name="T225"/></text:p>
      <text:p text:style-name="P8" loext:marker-style-name="T225"><text:span text:style-name="T225"><text:s text:c="18"/>/ <text:s text:c="7"/>\</text:span><text:span text:style-name="T225"/></text:p>
      <text:p text:style-name="P8" loext:marker-style-name="T225"><text:span text:style-name="T225"><text:s text:c="13"/>[20, 80] <text:s text:c="2"/>[30, 90]</text:span><text:span text:style-name="T225"/></text:p>
      <text:p text:style-name="P8"/>
      <text:p text:style-name="P8" loext:marker-style-name="T225"><text:span text:style-name="T225">Step 1：</text:span><text:span text:style-name="T226">新葉 [5, 5] </text:span><text:span text:style-name="T225">接在 [20, 80] 左子位置</text:span></text:p>
      <text:p text:style-name="P8" loext:marker-style-name="T225"><text:span text:style-name="T225"><text:s text:c="13"/>[10, 100]</text:span><text:span text:style-name="T225"/></text:p>
      <text:p text:style-name="P8" loext:marker-style-name="T225"><text:span text:style-name="T225"><text:s text:c="14"/>/ <text:s text:c="7"/>\</text:span><text:span text:style-name="T225"/></text:p>
      <text:p text:style-name="P8" loext:marker-style-name="T225"><text:span text:style-name="T225"><text:s text:c="9"/>[20, 80] <text:s text:c="2"/>[30, 90]</text:span><text:span text:style-name="T225"/></text:p>
      <text:p text:style-name="P8" loext:marker-style-name="T225"><text:span text:style-name="T225"><text:s text:c="14"/>/</text:span><text:span text:style-name="T225"/></text:p>
      <text:p text:style-name="P8" loext:marker-style-name="T225"><text:span text:style-name="T225"><text:s text:c="11"/>[5, 5] <text:s text:c="2"/>← </text:span><text:span text:style-name="T73">5 &lt; parent.min(20)</text:span><text:span text:style-name="T225">，</text:span><text:span text:style-name="T179">min 端需上浮</text:span></text:p>
      <text:p text:style-name="P8"/>
      <text:p text:style-name="P8" loext:marker-style-name="T225"><text:span text:style-name="T225">Step 2：</text:span><text:span text:style-name="T134">交換 min 端 → [20,80]→[5,80]</text:span><text:span text:style-name="T225">，</text:span><text:span text:style-name="T179">葉→[20,20]</text:span></text:p>
      <text:p text:style-name="P8" loext:marker-style-name="T225"><text:span text:style-name="T225"><text:s text:c="13"/>[10, 100]</text:span><text:span text:style-name="T225"/></text:p>
      <text:p text:style-name="P8" loext:marker-style-name="T225"><text:span text:style-name="T225"><text:s text:c="14"/>/ <text:s text:c="7"/>\</text:span><text:span text:style-name="T225"/></text:p>
      <text:p text:style-name="P8" loext:marker-style-name="T225"><text:span text:style-name="T225"><text:s text:c="10"/>[5, 80] <text:s text:c="2"/>[30, 90] <text:s text:c="2"/>← </text:span><text:span text:style-name="T73">5 &lt; Root.min(10)</text:span><text:span text:style-name="T225">，</text:span><text:span text:style-name="T179">繼續上浮</text:span></text:p>
      <text:p text:style-name="P8" loext:marker-style-name="T225"><text:span text:style-name="T225"><text:s text:c="14"/>/</text:span><text:span text:style-name="T225"/></text:p>
      <text:p text:style-name="P8" loext:marker-style-name="T225"><text:span text:style-name="T225"><text:s text:c="10"/>[20, 20]</text:span><text:span text:style-name="T225"/></text:p>
      <text:p text:style-name="P8"/>
      <text:p text:style-name="P8" loext:marker-style-name="T225"><text:span text:style-name="T225">Step 3：</text:span><text:span text:style-name="T134">交換 min 端 → Root[10,100]→[5,100]</text:span><text:span text:style-name="T225">，</text:span><text:span text:style-name="T179">[5,80]→[10,80]</text:span></text:p>
      <text:p text:style-name="P8"/>
      <text:p text:style-name="P8" loext:marker-style-name="T225"><text:span text:style-name="T225">最終： <text:s text:c="10"/>[5, 100] <text:s text:c="2"/>← </text:span><text:span text:style-name="T143">全域最小值已更新</text:span></text:p>
      <text:p text:style-name="P8" loext:marker-style-name="T225"><text:span text:style-name="T225"><text:s text:c="18"/>/ <text:s text:c="7"/>\</text:span><text:span text:style-name="T225"/></text:p>
      <text:p text:style-name="P8" loext:marker-style-name="T225"><text:span text:style-name="T225"><text:s text:c="13"/>[10, 80] <text:s text:c="2"/>[30, 90]</text:span><text:span text:style-name="T225"/></text:p>
      <text:p text:style-name="P8" loext:marker-style-name="T225"><text:span text:style-name="T225"><text:s text:c="18"/>/</text:span><text:span text:style-name="T225"/></text:p>
      <text:p text:style-name="P44" loext:marker-style-name="T225"><text:span text:style-name="T225"><text:s text:c="13"/>[20, 20]</text:span><text:span text:style-name="T225"/></text:p>
      <text:p text:style-name="P11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1" loext:marker-style-name="T209"><text:span text:style-name="T209">Insert </text:span><text:span text:style-name="T210">規則：</text:span></text:p>
            <text:p text:style-name="P11" loext:marker-style-name="T218"><text:span text:style-name="T219">新值 </text:span><text:span text:style-name="T218">&lt; </text:span><text:span text:style-name="T219">父節點左值（</text:span><text:span text:style-name="T218">min</text:span><text:span text:style-name="T219">）→ 交換左值，繼續往上（</text:span><text:span text:style-name="T218">min </text:span><text:span text:style-name="T219">端上浮）</text:span></text:p>
            <text:p text:style-name="P11" loext:marker-style-name="T218"><text:span text:style-name="T219">新值 </text:span><text:span text:style-name="T218">&gt; </text:span><text:span text:style-name="T219">父節點右值（</text:span><text:span text:style-name="T218">max</text:span><text:span text:style-name="T219">）→ 交換右值，繼續往上（</text:span><text:span text:style-name="T218">max </text:span><text:span text:style-name="T219">端上浮）</text:span></text:p>
            <text:p text:style-name="P46" loext:marker-style-name="T218"><text:span text:style-name="T219">新值介於父節點 </text:span><text:span text:style-name="T218">[min, max] </text:span><text:span text:style-name="T219">之間 → 合法，停止</text:span></text:p>
          </table:table-cell>
        </table:table-row>
      </table:table>
      <text:h text:style-name="P2" text:outline-level="1"><text:span text:style-name="T204">八、合併兩個 </text:span><text:span text:style-name="T203">Heap</text:span><text:span text:style-name="T204">（</text:span><text:span text:style-name="T203">Merge Heap</text:span><text:span text:style-name="T204">）【</text:span><text:span text:style-name="T203">111</text:span><text:span text:style-name="T204">地</text:span><text:span text:style-name="T203">Q4</text:span><text:span text:style-name="T204">】</text:span></text:h>
      <text:h text:style-name="P3" text:outline-level="2" loext:marker-style-name="T20"><text:span text:style-name="T20">8-1 <text:s/></text:span><text:span text:style-name="T21">問題起源：普通 </text:span><text:span text:style-name="T20">Heap </text:span><text:span text:style-name="T21">合併需要 </text:span><text:span text:style-name="T20">O(n+m)</text:span></text:h>
      <text:p text:style-name="P7" loext:marker-style-name="T207"><text:span text:style-name="T208">假設現在有兩個 </text:span><text:span text:style-name="T207">Max Heap A </text:span><text:span text:style-name="T208">和 </text:span><text:span text:style-name="T207">B</text:span><text:span text:style-name="T208">，你想把它們合併成一個新的 </text:span><text:span text:style-name="T207">Max Heap</text:span><text:span text:style-name="T208">：</text:span></text:p>
      <text:p text:style-name="P42" loext:marker-style-name="T225"><text:soft-page-break/><text:span text:style-name="T225"><text:s text:c="2"/>Heap A： <text:s text:c="9"/>Heap B： <text:s text:c="9"/>合併目標：</text:span><text:span text:style-name="T225"/></text:p>
      <text:p text:style-name="P8" loext:marker-style-name="T225"><text:span text:style-name="T225"><text:s text:c="7"/>90 <text:s text:c="15"/>95 <text:s text:c="16"/>95</text:span><text:span text:style-name="T225"/></text:p>
      <text:p text:style-name="P8" loext:marker-style-name="T225"><text:span text:style-name="T225"><text:s text:c="6"/>/ <text:s/>\ <text:s text:c="13"/>/ <text:s/>\ <text:s text:c="14"/>/ <text:s text:c="3"/>\</text:span><text:span text:style-name="T225"/></text:p>
      <text:p text:style-name="P8" loext:marker-style-name="T225"><text:span text:style-name="T225"><text:s text:c="5"/>70 <text:s text:c="2"/>80 <text:s text:c="10"/>60 <text:s text:c="2"/>50 <text:s text:c="10"/>90 <text:s text:c="5"/>80</text:span><text:span text:style-name="T225"/></text:p>
      <text:p text:style-name="P8" loext:marker-style-name="T225"><text:span text:style-name="T225"><text:s text:c="40"/>/ <text:s/>\ <text:s text:c="2"/>/</text:span><text:span text:style-name="T225"/></text:p>
      <text:p text:style-name="P44" loext:marker-style-name="T225"><text:span text:style-name="T225"><text:s text:c="39"/>70 <text:s/>60 50</text:span><text:span text:style-name="T225"/></text:p>
      <text:p text:style-name="P11"/>
      <text:p text:style-name="P7" loext:marker-style-name="T207"><text:span text:style-name="T208">普通 </text:span><text:span text:style-name="T207">Binary Heap </text:span><text:span text:style-name="T208">沒有高效的合併方法，通常只能：</text:span></text:p>
      <text:list text:continue-numbering="true" text:style-name="WWNum14">
        <text:list-item>
          <text:p text:style-name="P29" loext:marker-style-name="T207"><text:span text:style-name="T208">方法：把 </text:span><text:span text:style-name="T207">A </text:span><text:span text:style-name="T208">和 </text:span><text:span text:style-name="T207">B </text:span><text:span text:style-name="T208">的所有元素倒出來，重新執行 </text:span><text:span text:style-name="T207">Bottom-Up Build Heap</text:span><text:span text:style-name="T208">。</text:span></text:p>
        </text:list-item>
        <text:list-item>
          <text:p text:style-name="P29" loext:marker-style-name="T207"><text:span text:style-name="T208">代價：</text:span><text:span text:style-name="T207">O(n+m)</text:span><text:span text:style-name="T208">，</text:span><text:span text:style-name="T207">n </text:span><text:span text:style-name="T208">和 </text:span><text:span text:style-name="T207">m </text:span><text:span text:style-name="T208">是兩個 </text:span><text:span text:style-name="T207">Heap </text:span><text:span text:style-name="T208">的大小。</text:span></text:p>
        </text:list-item>
      </text:list>
      <text:p text:style-name="P11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1" loext:marker-style-name="T209"><text:span text:style-name="T209">❓ O(n+m) </text:span><text:span text:style-name="T210">有什麼問題？</text:span></text:p>
            <text:p text:style-name="P11" loext:marker-style-name="T218"><text:span text:style-name="T219">對單次合併來說 </text:span><text:span text:style-name="T218">O(n+m) </text:span><text:span text:style-name="T219">尚可接受，但有些系統一天要合併幾十萬次：</text:span></text:p>
            <text:p text:style-name="P11" loext:marker-style-name="T218"><text:span text:style-name="T218"><text:s text:c="2"/>• Event-driven Simulation</text:span><text:span text:style-name="T219">（事件驅動模擬）</text:span></text:p>
            <text:p text:style-name="P11" loext:marker-style-name="T218"><text:span text:style-name="T218"><text:s text:c="2"/>• </text:span><text:span text:style-name="T219">作業系統排程器（</text:span><text:span text:style-name="T218">Scheduler</text:span><text:span text:style-name="T219">）</text:span></text:p>
            <text:p text:style-name="P46" loext:marker-style-name="T218"><text:span text:style-name="T218"><text:s text:c="2"/>• </text:span><text:span text:style-name="T219">分散式工作佇列（</text:span><text:span text:style-name="T218">Distributed Job Queue</text:span><text:span text:style-name="T219">）</text:span></text:p>
          </table:table-cell>
        </table:table-row>
      </table:table>
      <text:p text:style-name="P12"/>
      <text:h text:style-name="P3" text:outline-level="2" loext:marker-style-name="T20"><text:span text:style-name="T20">8-2 <text:s/></text:span><text:span text:style-name="T21">解決方案：把右側路徑弄得很短</text:span></text:h>
      <text:p text:style-name="P7" loext:marker-style-name="T207"><text:span text:style-name="T208">發明者的想法很直接：</text:span><text:span text:style-name="T207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09"><text:span text:style-name="T209">Merge </text:span><text:span text:style-name="T210">只沿右側路徑（</text:span><text:span text:style-name="T209">right path</text:span><text:span text:style-name="T210">）遞迴進行。</text:span></text:p>
            <text:p text:style-name="P11" loext:marker-style-name="T218"><text:span text:style-name="T219">如果右側路徑很短 → </text:span><text:span text:style-name="T218">Merge </text:span><text:span text:style-name="T219">就很快。</text:span></text:p>
            <text:p text:style-name="P46" loext:marker-style-name="T218"><text:span text:style-name="T219">因此：故意把樹弄歪，讓右側路徑保持極短。</text:span><text:span text:style-name="T218"/></text:p>
          </table:table-cell>
        </table:table-row>
      </table:table>
      <text:p text:style-name="P11"/>
      <text:p text:style-name="P42" loext:marker-style-name="T225"><text:span text:style-name="T225"><text:s text:c="2"/>普通 Heap（平衡）： <text:s text:c="11"/>Leftist Heap（故意偏左）：</text:span><text:span text:style-name="T225"/></text:p>
      <text:p text:style-name="P8" loext:marker-style-name="T225"><text:span text:style-name="T225"><text:s text:c="8"/>90 <text:s text:c="29"/>90</text:span><text:span text:style-name="T225"/></text:p>
      <text:p text:style-name="P8" loext:marker-style-name="T225"><text:span text:style-name="T225"><text:s text:c="7"/>/ <text:s/>\ <text:s text:c="27"/>/</text:span><text:span text:style-name="T225"/></text:p>
      <text:p text:style-name="P8" loext:marker-style-name="T225"><text:span text:style-name="T225"><text:s text:c="6"/>80 <text:s text:c="2"/>70 <text:s text:c="24"/>80</text:span><text:span text:style-name="T225"/></text:p>
      <text:p text:style-name="P8" loext:marker-style-name="T225"><text:span text:style-name="T225"><text:s text:c="5"/>/ \ / \ <text:s text:c="24"/>/</text:span><text:span text:style-name="T225"/></text:p>
      <text:p text:style-name="P8" loext:marker-style-name="T225"><text:span text:style-name="T225"><text:s text:c="4"/>60 50 40 30 <text:s text:c="21"/>70</text:span><text:span text:style-name="T225"/></text:p>
      <text:p text:style-name="P8" loext:marker-style-name="T225"><text:span text:style-name="T225"><text:s text:c="36"/>/</text:span><text:span text:style-name="T225"/></text:p>
      <text:p text:style-name="P8" loext:marker-style-name="T225"><text:span text:style-name="T225"><text:s text:c="35"/>60</text:span><text:span text:style-name="T225"/></text:p>
      <text:p text:style-name="P8"/>
      <text:p text:style-name="P44" loext:marker-style-name="T225"><text:span text:style-name="T225"><text:s text:c="2"/>左右差不多，Merge 要走很深 <text:s text:c="5"/>右側路徑只有 1 步！Merge 超快</text:span><text:span text:style-name="T225"/></text:p>
      <text:p text:style-name="P12"/>
      <text:h text:style-name="P3" text:outline-level="2"><text:span text:style-name="T20">8-3 <text:s/>NPL</text:span><text:span text:style-name="T21">（</text:span><text:span text:style-name="T20">Null Path Length</text:span><text:span text:style-name="T21">，空路徑長度）</text:span></text:h>
      <text:p text:style-name="P7" loext:marker-style-name="T207"><text:span text:style-name="T207">NPL </text:span><text:span text:style-name="T208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1" loext:marker-style-name="T209"><text:span text:style-name="T209">NPL(node) = </text:span><text:span text:style-name="T210">從該節點出發，走到最近的空節點（</text:span><text:span text:style-name="T209">null</text:span><text:span text:style-name="T210">）所需的步數</text:span></text:p>
            <text:p text:style-name="P46" loext:marker-style-name="T218"><text:span text:style-name="T218">NPL(null) = -1 <text:s/></text:span><text:span text:style-name="T219">（空節點本身的定義）</text:span></text:p>
          </table:table-cell>
        </table:table-row>
      </table:table>
      <text:p text:style-name="P11"><text:soft-page-break/></text:p>
      <text:p text:style-name="P7" loext:marker-style-name="T207"><text:span text:style-name="T208">公式：</text:span><text:span text:style-name="T207">NPL(node) = 1 + min( NPL(</text:span><text:span text:style-name="T208">左子</text:span><text:span text:style-name="T207">), NPL(</text:span><text:span text:style-name="T208">右子</text:span><text:span text:style-name="T207">) )</text:span></text:p>
      <text:p text:style-name="P11"/>
      <text:p text:style-name="P47" loext:marker-style-name="T205"><text:span text:style-name="T205">NPL </text:span><text:span text:style-name="T206">計算範例</text:span></text:p>
      <text:p text:style-name="P42" loext:marker-style-name="T225"><text:span text:style-name="T225"><text:s text:c="14"/>3 <text:s text:c="11"/>← 算 NPL</text:span><text:span text:style-name="T225"/></text:p>
      <text:p text:style-name="P8" loext:marker-style-name="T225"><text:span text:style-name="T225"><text:s text:c="13"/>/ \</text:span><text:span text:style-name="T225"/></text:p>
      <text:p text:style-name="P8" loext:marker-style-name="T225"><text:span text:style-name="T225"><text:s text:c="12"/>5 <text:s text:c="2"/>8</text:span><text:span text:style-name="T225"/></text:p>
      <text:p text:style-name="P8" loext:marker-style-name="T225"><text:span text:style-name="T225"><text:s text:c="11"/>/ \</text:span><text:span text:style-name="T225"/></text:p>
      <text:p text:style-name="P8" loext:marker-style-name="T225"><text:span text:style-name="T225"><text:s text:c="10"/>9 <text:s text:c="2"/>7</text:span><text:span text:style-name="T225"/></text:p>
      <text:p text:style-name="P8"/>
      <text:p text:style-name="P8" loext:marker-style-name="T225"><text:span text:style-name="T225"><text:s text:c="2"/>計算（由葉往根）：</text:span><text:span text:style-name="T225"/></text:p>
      <text:p text:style-name="P8" loext:marker-style-name="T225"><text:span text:style-name="T225"><text:s text:c="4"/>NPL(9) = 1 + min(-1,-1) = 0 <text:s text:c="2"/>（葉節點，兩側皆空）</text:span><text:span text:style-name="T225"/></text:p>
      <text:p text:style-name="P8" loext:marker-style-name="T225"><text:span text:style-name="T225"><text:s text:c="4"/>NPL(7) = 0 <text:s text:c="20"/>（同上）</text:span><text:span text:style-name="T225"/></text:p>
      <text:p text:style-name="P8" loext:marker-style-name="T225"><text:span text:style-name="T225"><text:s text:c="4"/>NPL(8) = 0 <text:s text:c="20"/>（葉節點）</text:span><text:span text:style-name="T225"/></text:p>
      <text:p text:style-name="P8" loext:marker-style-name="T225"><text:span text:style-name="T225"><text:s text:c="4"/>NPL(5) = 1 + min(NPL(9),NPL(7)) = 1+min(0,0) = 1</text:span><text:span text:style-name="T225"/></text:p>
      <text:p text:style-name="P44" loext:marker-style-name="T225"><text:span text:style-name="T225"><text:s text:c="4"/>NPL(3) = 1 + min(NPL(5),NPL(8)) = 1+min(1,0) = 1</text:span><text:span text:style-name="T225"/></text:p>
      <text:p text:style-name="P12"/>
      <text:h text:style-name="P3" text:outline-level="2" loext:marker-style-name="T20"><text:span text:style-name="T20">8-4 <text:s/></text:span><text:span text:style-name="T21">左偏性質（</text:span><text:span text:style-name="T20">Leftist Property</text:span><text:span text:style-name="T21">）</text:span></text:h>
      <text:p text:style-name="P7" loext:marker-style-name="T207"><text:span text:style-name="T207">Leftist Heap </text:span><text:span text:style-name="T208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1" loext:marker-style-name="T209"><text:span text:style-name="T210">每個節點：</text:span><text:span text:style-name="T209">NPL</text:span><text:span text:style-name="T210">（左子樹）≥ </text:span><text:span text:style-name="T209">NPL</text:span><text:span text:style-name="T210">（右子樹）</text:span></text:p>
            <text:p text:style-name="P46" loext:marker-style-name="T218"><text:span text:style-name="T219">意思：左邊一定比右邊「深」或「一樣深」→ 右側路徑一定是最短路徑。</text:span><text:span text:style-name="T218"/></text:p>
          </table:table-cell>
        </table:table-row>
      </table:table>
      <text:p text:style-name="P11"/>
      <text:p text:style-name="P7" loext:marker-style-name="T207"><text:span text:style-name="T208">這個規定保證了：</text:span><text:span text:style-name="T207"/></text:p>
      <text:list text:continue-numbering="true" text:style-name="WWNum14">
        <text:list-item>
          <text:p text:style-name="P29" loext:marker-style-name="T207"><text:span text:style-name="T208">右側路徑長度 ≤ </text:span><text:span text:style-name="T207">log(n+1) <text:s/></text:span><text:span text:style-name="T208">（即使整棵樹有 </text:span><text:span text:style-name="T207">n </text:span><text:span text:style-name="T208">個節點，右路徑也不超過 </text:span><text:span text:style-name="T207">log n </text:span><text:span text:style-name="T208">步）</text:span></text:p>
        </text:list-item>
        <text:list-item>
          <text:p text:style-name="P29" loext:marker-style-name="T207"><text:span text:style-name="T207">Merge </text:span><text:span text:style-name="T208">沿右路徑進行 → 深度 ≤ </text:span><text:span text:style-name="T207">log n → </text:span><text:span text:style-name="T208">時間 </text:span><text:span text:style-name="T207">O(log n)</text:span></text:p>
        </text:list-item>
      </text:list>
      <text:p text:style-name="P11"/>
      <text:p text:style-name="P47" loext:marker-style-name="T205"><text:span text:style-name="T206">上面範例的左偏驗證</text:span><text:span text:style-name="T205"/></text:p>
      <text:p text:style-name="P42" loext:marker-style-name="T225"><text:span text:style-name="T225"><text:s text:c="2"/>節點 3：NPL(左=5) = 1 <text:s/>≥ <text:s/>NPL(右=8) = 0 <text:s text:c="2"/>✓ 左偏</text:span><text:span text:style-name="T225"/></text:p>
      <text:p text:style-name="P8" loext:marker-style-name="T225"><text:span text:style-name="T225"><text:s text:c="2"/>節點 5：NPL(左=9) = 0 <text:s/>≥ <text:s/>NPL(右=7) = 0 <text:s text:c="2"/>✓ 左偏（相等也算）</text:span><text:span text:style-name="T225"/></text:p>
      <text:p text:style-name="P8"/>
      <text:p text:style-name="P44" loext:marker-style-name="T225"><text:span text:style-name="T225">→ 此樹是合法的 Min Leftist Heap ✓</text:span><text:span text:style-name="T225"/></text:p>
      <text:p text:style-name="P12"/>
      <text:h text:style-name="P3" text:outline-level="2"><text:span text:style-name="T20">8-5 <text:s/>Merge </text:span><text:span text:style-name="T21">演算法（以 </text:span><text:span text:style-name="T20">Min Leftist Heap </text:span><text:span text:style-name="T21">為例）</text:span></text:h>
      <text:p text:style-name="P7" loext:marker-style-name="T207"><text:span text:style-name="T208">只有四個步驟，每次都沿右側路徑遞迴：</text:span><text:span text:style-name="T207"/></text:p>
      <text:p text:style-name="P42" loext:marker-style-name="T225"><text:span text:style-name="T225"><text:s text:c="2"/>Step 1：比較 A 和 B 的 Root</text:span><text:span text:style-name="T225"/></text:p>
      <text:p text:style-name="P8" loext:marker-style-name="T225"><text:span text:style-name="T225"><text:s text:c="11"/>→ 較小的 Root 成為新 Root（Min Heap）</text:span><text:span text:style-name="T225"/></text:p>
      <text:p text:style-name="P8" loext:marker-style-name="T225"><text:span text:style-name="T225"><text:s text:c="11"/>→ 較大的 Root 成為另一個子樹（稱為 b）</text:span><text:span text:style-name="T225"/></text:p>
      <text:p text:style-name="P8"/>
      <text:p text:style-name="P8" loext:marker-style-name="T225"><text:span text:style-name="T225"><text:s text:c="2"/>Step 2：遞迴合併「新 Root 的右子樹」與「b」</text:span><text:span text:style-name="T225"/></text:p>
      <text:p text:style-name="P8" loext:marker-style-name="T225"><text:span text:style-name="T225"><text:s text:c="11"/>→ Merge(newRoot.right, b)</text:span><text:span text:style-name="T225"/></text:p>
      <text:p text:style-name="P8"/>
      <text:p text:style-name="P8" loext:marker-style-name="T225"><text:soft-page-break/><text:span text:style-name="T225"><text:s text:c="2"/>Step 3：合併完後，若 NPL(右子樹) &gt; NPL(左子樹)</text:span><text:span text:style-name="T225"/></text:p>
      <text:p text:style-name="P8" loext:marker-style-name="T225"><text:span text:style-name="T225"><text:s text:c="11"/>→ 交換左右子樹，恢復左偏性質</text:span><text:span text:style-name="T225"/></text:p>
      <text:p text:style-name="P8"/>
      <text:p text:style-name="P44" loext:marker-style-name="T225"><text:span text:style-name="T225"><text:s text:c="2"/>Step 4：更新 NPL 值</text:span><text:span text:style-name="T225"/></text:p>
      <text:p text:style-name="P11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1" loext:marker-style-name="T209"><text:span text:style-name="T210">為什麼只走右側路徑？</text:span><text:span text:style-name="T209"/></text:p>
            <text:p text:style-name="P11" loext:marker-style-name="T218"><text:span text:style-name="T218">Merge </text:span><text:span text:style-name="T219">每次遞迴都只取「右子樹」→ 路徑深度 </text:span><text:span text:style-name="T218">= </text:span><text:span text:style-name="T219">右側路徑長度 ≤ </text:span><text:span text:style-name="T218">log n</text:span><text:span text:style-name="T219">。</text:span></text:p>
            <text:p text:style-name="P46" loext:marker-style-name="T218"><text:span text:style-name="T219">左側路徑完全不碰，保持不變。</text:span><text:span text:style-name="T218"/></text:p>
          </table:table-cell>
        </table:table-row>
      </table:table>
      <text:p text:style-name="P12"/>
      <text:h text:style-name="P3" text:outline-level="2" loext:marker-style-name="T20"><text:span text:style-name="T20">8-6 <text:s/>Merge </text:span><text:span text:style-name="T21">完整範例</text:span></text:h>
      <text:p text:style-name="P42" loext:marker-style-name="T225"><text:span text:style-name="T225"><text:s text:c="2"/>Heap A（NPL=1）： <text:s text:c="5"/>Heap B（NPL=1）：</text:span><text:span text:style-name="T225"/></text:p>
      <text:p text:style-name="P8" loext:marker-style-name="T225"><text:span text:style-name="T225"><text:s text:c="10"/>3 <text:s text:c="21"/>6</text:span><text:span text:style-name="T225"/></text:p>
      <text:p text:style-name="P8" loext:marker-style-name="T225"><text:span text:style-name="T225"><text:s text:c="9"/>/ \ <text:s text:c="18"/>/ \</text:span><text:span text:style-name="T225"/></text:p>
      <text:p text:style-name="P8" loext:marker-style-name="T225"><text:span text:style-name="T225"><text:s text:c="8"/>5 <text:s text:c="2"/>8 <text:s text:c="15"/>12 <text:s text:c="2"/>7</text:span><text:span text:style-name="T225"/></text:p>
      <text:p text:style-name="P8"/>
      <text:p text:style-name="P8" loext:marker-style-name="T225"><text:span text:style-name="T225"><text:s text:c="2"/>Step 1：3 &lt; 6 → 3 為新 Root，遞迴 Merge(A.right=8, B=6)</text:span><text:span text:style-name="T225"/></text:p>
      <text:p text:style-name="P8"/>
      <text:p text:style-name="P8" loext:marker-style-name="T225"><text:span text:style-name="T225"><text:s text:c="2"/>Step 2：Merge(8, 6)：6 &lt; 8 → 6 為新 Root，遞迴 Merge(B.right=7, 8)</text:span><text:span text:style-name="T225"/></text:p>
      <text:p text:style-name="P8"/>
      <text:p text:style-name="P8" loext:marker-style-name="T225"><text:span text:style-name="T225"><text:s text:c="2"/>Step 3：Merge(7, 8)：7 &lt; 8 → 7 為新 Root</text:span><text:span text:style-name="T225"/></text:p>
      <text:p text:style-name="P8" loext:marker-style-name="T225"><text:span text:style-name="T225"><text:s text:c="11"/>Merge(null, 8) = 8 <text:s/>→ <text:s/>7.right = 8</text:span><text:span text:style-name="T225"/></text:p>
      <text:p text:style-name="P8" loext:marker-style-name="T225"><text:span text:style-name="T225"><text:s text:c="11"/>NPL(7.left=null)=-1 &lt; NPL(7.right=8)=0 <text:s/>→ <text:s/>交換左右！</text:span><text:span text:style-name="T225"/></text:p>
      <text:p text:style-name="P8" loext:marker-style-name="T225"><text:span text:style-name="T225"><text:s text:c="11"/>結果：7.left=8, 7.right=null, NPL(7)=0</text:span><text:span text:style-name="T225"/></text:p>
      <text:p text:style-name="P8" loext:marker-style-name="T225"><text:span text:style-name="T225"><text:s text:c="20"/>7</text:span><text:span text:style-name="T225"/></text:p>
      <text:p text:style-name="P8" loext:marker-style-name="T225"><text:span text:style-name="T225"><text:s text:c="19"/>/</text:span><text:span text:style-name="T225"/></text:p>
      <text:p text:style-name="P8" loext:marker-style-name="T225"><text:span text:style-name="T225"><text:s text:c="18"/>8</text:span><text:span text:style-name="T225"/></text:p>
      <text:p text:style-name="P8"/>
      <text:p text:style-name="P8" loext:marker-style-name="T225"><text:span text:style-name="T225"><text:s text:c="2"/>Step 4：回填 Merge(8,6)：6.left=12, 6.right=7</text:span><text:span text:style-name="T225"/></text:p>
      <text:p text:style-name="P8" loext:marker-style-name="T225"><text:span text:style-name="T225"><text:s text:c="11"/>NPL(12)=0 = NPL(7)=0 <text:s/>→ <text:s/>不需交換</text:span><text:span text:style-name="T225"/></text:p>
      <text:p text:style-name="P8" loext:marker-style-name="T225"><text:span text:style-name="T225"><text:s text:c="11"/>NPL(6) = min(0,0)+1 = 1</text:span><text:span text:style-name="T225"/></text:p>
      <text:p text:style-name="P8" loext:marker-style-name="T225"><text:span text:style-name="T225"><text:s text:c="20"/>6 <text:s/>[NPL=1]</text:span><text:span text:style-name="T225"/></text:p>
      <text:p text:style-name="P8" loext:marker-style-name="T225"><text:span text:style-name="T225"><text:s text:c="19"/>/ \</text:span><text:span text:style-name="T225"/></text:p>
      <text:p text:style-name="P8" loext:marker-style-name="T225"><text:span text:style-name="T225"><text:s text:c="17"/>12 <text:s text:c="2"/>7</text:span><text:span text:style-name="T225"/></text:p>
      <text:p text:style-name="P8" loext:marker-style-name="T225"><text:span text:style-name="T225"><text:s text:c="21"/>/</text:span><text:span text:style-name="T225"/></text:p>
      <text:p text:style-name="P8" loext:marker-style-name="T225"><text:span text:style-name="T225"><text:s text:c="20"/>8</text:span><text:span text:style-name="T225"/></text:p>
      <text:p text:style-name="P8"/>
      <text:p text:style-name="P8" loext:marker-style-name="T225"><text:span text:style-name="T225"><text:s text:c="2"/>Step 5：回填 Merge(A,B)：3.left=5, 3.right=6</text:span><text:span text:style-name="T225"/></text:p>
      <text:p text:style-name="P8" loext:marker-style-name="T225"><text:span text:style-name="T225"><text:s text:c="11"/>NPL(3.right=6)=1 &gt; NPL(3.left=5)=0 <text:s/>→ <text:s/>交換左右！</text:span><text:span text:style-name="T225"/></text:p>
      <text:p text:style-name="P44" loext:marker-style-name="T225"><text:span text:style-name="T225"><text:s text:c="11"/>NPL(3) = min(NPL(6),NPL(5))+1 = min(1,0)+1 = 1</text:span><text:span text:style-name="T225"/></text:p>
      <text:p text:style-name="P14"/>
      <text:p text:style-name="P10"><text:s text:c="2"/>最終合併結果（Min Leftist Heap）：</text:p>
      <text:p text:style-name="P8"/>
      <text:p text:style-name="P8" loext:marker-style-name="T225"><text:span text:style-name="T225"><text:s text:c="14"/>3 <text:s/>[NPL=1]</text:span><text:span text:style-name="T225"/></text:p>
      <text:p text:style-name="P8" loext:marker-style-name="T225"><text:span text:style-name="T225"><text:s text:c="13"/>/ \</text:span><text:span text:style-name="T225"/></text:p>
      <text:p text:style-name="P8" loext:marker-style-name="T225"><text:span text:style-name="T225"><text:s text:c="12"/>6 <text:s text:c="2"/>5 <text:s/>[NPL=0]</text:span><text:span text:style-name="T225"/></text:p>
      <text:p text:style-name="P8" loext:marker-style-name="T225"><text:span text:style-name="T225"><text:s text:c="11"/>/ \</text:span><text:span text:style-name="T225"/></text:p>
      <text:p text:style-name="P8" loext:marker-style-name="T225"><text:span text:style-name="T225"><text:s text:c="9"/>12 <text:s text:c="2"/>7 <text:s/>[NPL=0]</text:span><text:span text:style-name="T225"/></text:p>
      <text:p text:style-name="P8" loext:marker-style-name="T225"><text:span text:style-name="T225"><text:s text:c="13"/>/</text:span><text:span text:style-name="T225"/></text:p>
      <text:p text:style-name="P8" loext:marker-style-name="T225"><text:span text:style-name="T225"><text:s text:c="12"/>8</text:span><text:span text:style-name="T225"/></text:p>
      <text:p text:style-name="P8"/>
      <text:p text:style-name="P8" loext:marker-style-name="T225"><text:span text:style-name="T225"><text:s text:c="2"/>驗證 Min Heap：3&lt;6 ✓ <text:s/>3&lt;5 ✓ <text:s/>6&lt;12 ✓ <text:s/>6&lt;7 ✓ <text:s/>7&lt;8 ✓</text:span><text:span text:style-name="T225"/></text:p>
      <text:p text:style-name="P44" loext:marker-style-name="T225"><text:soft-page-break/><text:span text:style-name="T225"><text:s text:c="2"/>驗證左偏性：NPL(6)=1 ≥ NPL(5)=0 ✓ <text:s/>NPL(12)=0 ≥ NPL(7)=0 ✓</text:span><text:span text:style-name="T225"/></text:p>
      <text:p text:style-name="P12"/>
      <text:h text:style-name="P3" text:outline-level="2" loext:marker-style-name="T20"><text:span text:style-name="T20">8-7 <text:s/></text:span><text:span text:style-name="T21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41"><text:span text:style-name="T242">操作</text:span><text:span text:style-name="T241"/></text:p>
          </table:table-cell>
          <table:table-cell table:style-name="表格47.A1" office:value-type="string">
            <text:p text:style-name="Standard" loext:marker-style-name="T241"><text:span text:style-name="T242">普通 </text:span><text:span text:style-name="T241">Binary Heap</text:span></text:p>
          </table:table-cell>
          <table:table-cell table:style-name="表格47.A1" office:value-type="string">
            <text:p text:style-name="Standard" loext:marker-style-name="T241"><text:span text:style-name="T241">Leftist Heap</text:span><text:span text:style-name="T241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3"><text:span text:style-name="T223">Insert</text:span><text:span text:style-name="T223"/></text:p>
          </table:table-cell>
          <table:table-cell table:style-name="表格47.A2" office:value-type="string">
            <text:p text:style-name="Standard" loext:marker-style-name="T223"><text:span text:style-name="T223">O(log n)</text:span><text:span text:style-name="T223"/></text:p>
          </table:table-cell>
          <table:table-cell table:style-name="表格47.A2" office:value-type="string">
            <text:p text:style-name="Standard" loext:marker-style-name="T223"><text:span text:style-name="T223">O(log n)</text:span><text:span text:style-name="T223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23"><text:span text:style-name="T223">Extract-Min/Max</text:span><text:span text:style-name="T223"/></text:p>
          </table:table-cell>
          <table:table-cell table:style-name="表格47.A3" office:value-type="string">
            <text:p text:style-name="Standard" loext:marker-style-name="T223"><text:span text:style-name="T223">O(log n)</text:span><text:span text:style-name="T223"/></text:p>
          </table:table-cell>
          <table:table-cell table:style-name="表格47.A3" office:value-type="string">
            <text:p text:style-name="Standard" loext:marker-style-name="T223"><text:span text:style-name="T223">O(log n)</text:span><text:span text:style-name="T223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3"><text:span text:style-name="T223">Merge</text:span><text:span text:style-name="T224">（合併兩個 </text:span><text:span text:style-name="T223">Heap</text:span><text:span text:style-name="T224">）</text:span></text:p>
          </table:table-cell>
          <table:table-cell table:style-name="表格47.A2" office:value-type="string">
            <text:p text:style-name="Standard" loext:marker-style-name="T223"><text:span text:style-name="T223">O(n+m) </text:span><text:span text:style-name="T224">重建</text:span></text:p>
          </table:table-cell>
          <table:table-cell table:style-name="表格47.A2" office:value-type="string">
            <text:p text:style-name="Standard" loext:marker-style-name="T223"><text:span text:style-name="T223">O(log n + log m) ★</text:span><text:span text:style-name="T223"/></text:p>
          </table:table-cell>
        </table:table-row>
      </table:table>
      <text:p text:style-name="P7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1" loext:marker-style-name="T209"><text:span text:style-name="T209">⚠️ <text:s/></text:span><text:span text:style-name="T210">重要：</text:span><text:span text:style-name="T209">Min vs. Max Leftist Heap</text:span></text:p>
            <text:p text:style-name="P11" loext:marker-style-name="T218"><text:span text:style-name="T218">Min Leftist Heap → Merge </text:span><text:span text:style-name="T219">時，較小的 </text:span><text:span text:style-name="T218">Root </text:span><text:span text:style-name="T219">成為新 </text:span><text:span text:style-name="T218">Root</text:span></text:p>
            <text:p text:style-name="P11" loext:marker-style-name="T218"><text:span text:style-name="T218">Max Leftist Heap → Merge </text:span><text:span text:style-name="T219">時，較大的 </text:span><text:span text:style-name="T218">Root </text:span><text:span text:style-name="T219">成為新 </text:span><text:span text:style-name="T218">Root</text:span></text:p>
            <text:p text:style-name="P46" loext:marker-style-name="T218"><text:span text:style-name="T219">演算法步驟完全相同，只有「誰當新 </text:span><text:span text:style-name="T218">Root</text:span><text:span text:style-name="T219">」的比較方向相反。</text:span></text:p>
          </table:table-cell>
        </table:table-row>
      </table:table>
      <text:h text:style-name="P17" text:outline-level="1" loext:marker-style-name="T203"/>
      <text:p text:style-name="P1"/>
      <text:h text:style-name="P15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3" loext:marker-style-name="T29"><text:span text:style-name="T30">這是許多考生最容易混淆的地方，必須徹底釐清各資料結構的設計目的。</text:span><text:span text:style-name="T29"/></text:p>
      <text:p text:style-name="P1"/>
      <text:h text:style-name="P18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2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2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2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2" loext:marker-style-name="T41"><text:span text:style-name="T48">BST</text:span><text:span text:style-name="T41"/></text:p>
          </table:table-cell>
          <table:table-cell table:style-name="表格49.A2" office:value-type="string">
            <text:p text:style-name="P32" loext:marker-style-name="T41"><text:span text:style-name="T59">快速搜尋特定值</text:span><text:span text:style-name="T41"/></text:p>
          </table:table-cell>
          <table:table-cell table:style-name="表格49.A2" office:value-type="string">
            <text:p text:style-name="P32" loext:marker-style-name="T41"><text:span text:style-name="T59">左 </text:span><text:span text:style-name="T48">&lt; </text:span><text:span text:style-name="T59">根 </text:span><text:span text:style-name="T48">&lt; </text:span><text:span text:style-name="T59">右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AVL Tree</text:span><text:span text:style-name="T41"/></text:p>
          </table:table-cell>
          <table:table-cell table:style-name="表格49.A2" office:value-type="string">
            <text:p text:style-name="P32" loext:marker-style-name="T41"><text:span text:style-name="T59">平衡 </text:span><text:span text:style-name="T48">BST</text:span><text:span text:style-name="T59">，穩定搜尋</text:span></text:p>
          </table:table-cell>
          <table:table-cell table:style-name="表格49.A2" office:value-type="string">
            <text:p text:style-name="P32" loext:marker-style-name="T41"><text:span text:style-name="T59">高度差 ≤ </text:span><text:span text:style-name="T48">1</text:span><text:span text:style-name="T59">，</text:span><text:span text:style-name="T48">h = O(log n)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Red-Black Tree</text:span><text:span text:style-name="T41"/></text:p>
          </table:table-cell>
          <table:table-cell table:style-name="表格49.A2" office:value-type="string">
            <text:p text:style-name="P32" loext:marker-style-name="T41"><text:span text:style-name="T59">平衡 </text:span><text:span text:style-name="T48">BST</text:span><text:span text:style-name="T59">，減少旋轉</text:span></text:p>
          </table:table-cell>
          <table:table-cell table:style-name="表格49.A2" office:value-type="string">
            <text:p text:style-name="P32" loext:marker-style-name="T41"><text:span text:style-name="T59">顏色規則，</text:span><text:span text:style-name="T48">h = O(log n)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Heap</text:span><text:span text:style-name="T41"/></text:p>
          </table:table-cell>
          <table:table-cell table:style-name="表格49.A2" office:value-type="string">
            <text:p text:style-name="P32" loext:marker-style-name="T41"><text:span text:style-name="T59">快速取最大</text:span><text:span text:style-name="T48">/</text:span><text:span text:style-name="T59">最小值</text:span></text:p>
          </table:table-cell>
          <table:table-cell table:style-name="表格49.A2" office:value-type="string">
            <text:p text:style-name="P32" loext:marker-style-name="T41"><text:span text:style-name="T59">父 ≥ 子（</text:span><text:span text:style-name="T48">Max</text:span><text:span text:style-name="T59">）或父 ≤ 子（</text:span><text:span text:style-name="T48">Min</text:span><text:span text:style-name="T59">）</text:span></text:p>
          </table:table-cell>
        </table:table-row>
      </table:table>
      <text:p text:style-name="P1"/>
      <text:h text:style-name="P18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ext:soft-page-break/>
          <table:table-row table:style-name="表格50.1">
            <table:table-cell table:style-name="表格50.A1" office:value-type="string">
              <text:p text:style-name="P32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2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2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2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2" loext:marker-style-name="T41"><text:span text:style-name="T59">搜尋特定值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❌ O(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Heap </text:span><text:span text:style-name="T59">無排序規則</text:span></text:p>
          </table:table-cell>
        </table:table-row>
        <table:table-row table:style-name="表格50.1">
          <table:table-cell table:style-name="表格50.A3" office:value-type="string">
            <text:p text:style-name="P32" loext:marker-style-name="T41"><text:span text:style-name="T59">找最大值（</text:span><text:span text:style-name="T48">view</text:span><text:span text:style-name="T59">）</text:span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48">✅ O(1)</text:span><text:span text:style-name="T41"/></text:p>
          </table:table-cell>
          <table:table-cell table:style-name="表格50.A3" office:value-type="string">
            <text:p text:style-name="P32" loext:marker-style-name="T41"><text:span text:style-name="T48">Heap Root </text:span><text:span text:style-name="T59">即最大值</text:span></text:p>
          </table:table-cell>
        </table:table-row>
        <table:table-row table:style-name="表格50.1">
          <table:table-cell table:style-name="表格50.A2" office:value-type="string">
            <text:p text:style-name="P32" loext:marker-style-name="T41"><text:span text:style-name="T48">Extract-Max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59">相同</text:span><text:span text:style-name="T41"/></text:p>
          </table:table-cell>
        </table:table-row>
        <table:table-row table:style-name="表格50.1">
          <table:table-cell table:style-name="表格50.A3" office:value-type="string">
            <text:p text:style-name="P32" loext:marker-style-name="T41"><text:span text:style-name="T48">Insert</text:span><text:span text:style-name="T41"/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59">相同</text:span><text:span text:style-name="T41"/></text:p>
          </table:table-cell>
        </table:table-row>
        <table:table-row table:style-name="表格50.1">
          <table:table-cell table:style-name="表格50.A2" office:value-type="string">
            <text:p text:style-name="P32" loext:marker-style-name="T41"><text:span text:style-name="T48">Delete </text:span><text:span text:style-name="T59">任意</text:span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n) </text:span><text:span text:style-name="T59">找 </text:span><text:span text:style-name="T48">+ O(log n) </text:span><text:span text:style-name="T59">刪</text:span></text:p>
          </table:table-cell>
          <table:table-cell table:style-name="表格50.A2" office:value-type="string">
            <text:p text:style-name="P32" loext:marker-style-name="T41"><text:span text:style-name="T48">Heap </text:span><text:span text:style-name="T59">找到要刪的節點要 </text:span><text:span text:style-name="T48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" loext:marker-style-name="T41"><text:span text:style-name="T48">⚠️ <text:s/></text:span><text:span text:style-name="T59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59">「</text:span><text:span text:style-name="T48">Max Heap </text:span><text:span text:style-name="T59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4"/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❌ </text:span><text:span text:style-name="T59">錯誤答案：</text:span><text:span text:style-name="T48">O(log n) <text:s/>← </text:span><text:span text:style-name="T59">看到樹就聯想 </text:span><text:span text:style-name="T48">log n </text:span><text:span text:style-name="T59">是常見誤區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✅ </text:span><text:span text:style-name="T59">正確答案：</text:span><text:span text:style-name="T48">O(n)</text:span></text:p>
          </table:table-cell>
        </table:table-row>
        <table:table-row table:style-name="表格51.1">
          <table:table-cell table:style-name="表格51.A1" office:value-type="string">
            <text:p text:style-name="P4"/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59">原因：</text:span><text:span text:style-name="T48">Heap </text:span><text:span text:style-name="T59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<text:s text:c="6"/></text:span><text:span text:style-name="T59">最壞情況需掃描所有節點。</text:span></text:p>
          </table:table-cell>
        </table:table-row>
      </table:table>
      <text:p text:style-name="P1"/>
      <text:h text:style-name="P18" text:outline-level="2" loext:marker-style-name="T17"><text:span text:style-name="T18">為什麼 </text:span><text:span text:style-name="T25">Linux</text:span><text:span text:style-name="T26"> </text:span><text:span text:style-name="T18">選擇 </text:span><text:span text:style-name="T25">Red-Black Tree</text:span><text:span text:style-name="T26"> </text:span><text:span text:style-name="T18">而非 </text:span><text:span text:style-name="T25">AVL</text:span><text:span text:style-name="T18">？</text:span></text:h>
      <text:list text:continue-list="list3819085238" text:style-name="WWNum2">
        <text:list-item>
          <text:p text:style-name="P40" loext:marker-style-name="T29"><text:span text:style-name="T47">AVL</text:span><text:span text:style-name="T30">：搜尋最快，但插入</text:span><text:span text:style-name="T47">/</text:span><text:span text:style-name="T30">刪除旋轉次數多，修改成本高。</text:span></text:p>
        </text:list-item>
        <text:list-item>
          <text:p text:style-name="P40" loext:marker-style-name="T29"><text:span text:style-name="T47">Red-Black Tree</text:span><text:span text:style-name="T30">：搜尋稍慢，但插入</text:span><text:span text:style-name="T47">/</text:span><text:span text:style-name="T30">刪除旋轉較少，整體效能均衡。</text:span></text:p>
        </text:list-item>
        <text:list-item>
          <text:p text:style-name="P40" loext:marker-style-name="T29"><text:span text:style-name="T47">Linux Kernel </text:span><text:span text:style-name="T30">的 </text:span><text:span text:style-name="T47">CFS </text:span><text:span text:style-name="T30">排程器、記憶體管理（</text:span><text:span text:style-name="T47">VMA</text:span><text:span text:style-name="T30">）、</text:span><text:span text:style-name="T47">Timer </text:span><text:span text:style-name="T30">均採用 </text:span><text:span text:style-name="T47">Red-Black Tree</text:span><text:span text:style-name="T30">。</text:span></text:p>
        </text:list-item>
      </text:list>
      <text:p text:style-name="P1"/>
      <text:p text:style-name="P1"/>
      <text:h text:style-name="P15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1</text:span><text:span text:style-name="T59">：</text:span><text:span text:style-name="T48">Heap </text:span><text:span text:style-name="T59">搜尋 ≠ </text:span><text:span text:style-name="T48">O(log n)</text:span><text:span text:style-name="T59">，正確為 </text:span><text:span text:style-name="T48">O(n)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2</text:span><text:span text:style-name="T59">：</text:span><text:span text:style-name="T48">Build Heap ≠ O(n log n)</text:span><text:span text:style-name="T59">，</text:span><text:span text:style-name="T48">Bottom-Up </text:span><text:span text:style-name="T59">法正確為 </text:span><text:span text:style-name="T48">O(n)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3</text:span><text:span text:style-name="T59">：</text:span><text:span text:style-name="T48">Heap </text:span><text:span text:style-name="T59">是 </text:span><text:span text:style-name="T48">Complete Binary Tree</text:span><text:span text:style-name="T59">，不是 </text:span><text:span text:style-name="T48">Full Binary Tree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ext:soft-page-break/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4</text:span><text:span text:style-name="T59">：陣列索引從 </text:span><text:span text:style-name="T48">1 </text:span><text:span text:style-name="T59">開始，</text:span><text:span text:style-name="T48">parent = ⌊i/2⌋</text:span><text:span text:style-name="T59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5</text:span><text:span text:style-name="T59">：</text:span><text:span text:style-name="T48">Interval Heap </text:span><text:span text:style-name="T59">每個節點存的是區間 </text:span><text:span text:style-name="T48">[min, max]</text:span><text:span text:style-name="T59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6</text:span><text:span text:style-name="T59">：</text:span><text:span text:style-name="T48">Merge Leftist Heap </text:span><text:span text:style-name="T59">的新 </text:span><text:span text:style-name="T48">Root </text:span><text:span text:style-name="T59">是兩個 </text:span><text:span text:style-name="T48">Root </text:span><text:span text:style-name="T59">中較小的（</text:span><text:span text:style-name="T48">Min Heap</text:span><text:span text:style-name="T59">），</text:span></text:p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48"><text:s text:c="8"/>Max Leftist Heap </text:span><text:span text:style-name="T59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7</text:span><text:span text:style-name="T59">：</text:span><text:span text:style-name="T48">Heap Sort </text:span><text:span text:style-name="T59">是 </text:span><text:span text:style-name="T48">Unstable Sort</text:span><text:span text:style-name="T59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8</text:span><text:span text:style-name="T59">：</text:span><text:span text:style-name="T48">Heap Sort </text:span><text:span text:style-name="T59">空間複雜度是 </text:span><text:span text:style-name="T48">O(1)</text:span><text:span text:style-name="T59">（</text:span><text:span text:style-name="T48">In-place</text:span><text:span text:style-name="T59">），不需額外空間。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十一、考試必背速查表（最終記憶版）</text:span><text:span text:style-name="T3"/></text:h>
      <text:p text:style-name="P1"/>
      <text:h text:style-name="P18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" loext:marker-style-name="T41"><text:span text:style-name="T48">Heap = Complete Binary Tree + Heap Property</text:span><text:span text:style-name="T59">（</text:span><text:span text:style-name="T48">parent ≤/≥ child</text:span><text:span text:style-name="T59">）</text:span></text:p>
          </table:table-cell>
        </table:table-row>
        <table:table-row table:style-name="表格53.1">
          <table:table-cell table:style-name="表格53.A1" office:value-type="string">
            <text:p text:style-name="P4"/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59">陣列索引（從 </text:span><text:span text:style-name="T48">1 </text:span><text:span text:style-name="T59">起）：</text:span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Root <text:s text:c="4"/>= A[1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Parent(i) = A[⌊i/2⌋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Left(i) <text:s/>= A[2i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Right(i) = A[2i+1]</text:span><text:span text:style-name="T41"/></text:p>
          </table:table-cell>
        </table:table-row>
      </table:table>
      <text:p text:style-name="P1"/>
      <text:h text:style-name="P18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2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2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2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2" loext:marker-style-name="T41"><text:span text:style-name="T48">Insert</text:span><text:span text:style-name="T59">（</text:span><text:span text:style-name="T48">Bubble Up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最多走 </text:span><text:span text:style-name="T48">h = log n </text:span><text:span text:style-name="T59">層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Extract-Max</text:span><text:span text:style-name="T59">（</text:span><text:span text:style-name="T48">Heapify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最多走 </text:span><text:span text:style-name="T48">h = log n </text:span><text:span text:style-name="T59">層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Build Heap</text:span><text:span text:style-name="T59">（</text:span><text:span text:style-name="T48">Bottom-Up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n) ★</text:span><text:span text:style-name="T41"/></text:p>
          </table:table-cell>
          <table:table-cell table:style-name="表格54.A2" office:value-type="string">
            <text:p text:style-name="P32" loext:marker-style-name="T41"><text:span text:style-name="T48">Floyd </text:span><text:span text:style-name="T59">演算法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59">逐個 </text:span><text:span text:style-name="T48">Insert </text:span><text:span text:style-name="T59">建 </text:span><text:span text:style-name="T48">Heap</text:span></text:p>
          </table:table-cell>
          <table:table-cell table:style-name="表格54.A2" office:value-type="string">
            <text:p text:style-name="P32" loext:marker-style-name="T41"><text:span text:style-name="T48">O(n 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48">n </text:span><text:span text:style-name="T59">次 </text:span><text:span text:style-name="T48">× O(log n)</text:span></text:p>
          </table:table-cell>
        </table:table-row>
        <text:soft-page-break/>
        <table:table-row table:style-name="表格54.1">
          <table:table-cell table:style-name="表格54.A2" office:value-type="string">
            <text:p text:style-name="P32" loext:marker-style-name="T41"><text:span text:style-name="T48">Heap Sort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 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) + O(n log n)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59">搜尋特定值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無左右排序規則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Merge (Leftist Heap)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log n + log m)</text:span><text:span text:style-name="T41"/></text:p>
          </table:table-cell>
          <table:table-cell table:style-name="表格54.A2" office:value-type="string">
            <text:p text:style-name="P32" loext:marker-style-name="T41"><text:span text:style-name="T59">右側路徑短</text:span><text:span text:style-name="T41"/></text:p>
          </table:table-cell>
        </table:table-row>
      </table:table>
      <text:p text:style-name="P1"/>
      <text:h text:style-name="P18" text:outline-level="2" loext:marker-style-name="T17"><text:span text:style-name="T26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2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2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2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 loext:marker-style-name="T41"><text:span text:style-name="T59">排序陣列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1) <text:s/></text:span><text:span text:style-name="T59">取快插慢</text:span></text:p>
          </table:table-cell>
        </table:table-row>
        <table:table-row table:style-name="表格55.1">
          <table:table-cell table:style-name="表格55.A2" office:value-type="string">
            <text:p text:style-name="P32" loext:marker-style-name="T41"><text:span text:style-name="T59">未排序陣列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1)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n) <text:s/></text:span><text:span text:style-name="T59">插快取慢</text:span></text:p>
          </table:table-cell>
        </table:table-row>
        <table:table-row table:style-name="表格55.1">
          <table:table-cell table:style-name="表格55.A4" office:value-type="string">
            <text:p text:style-name="P32" loext:marker-style-name="T41"><text:span text:style-name="T48">Max Heap ★</text:span><text:span text:style-name="T41"/></text:p>
          </table:table-cell>
          <table:table-cell table:style-name="表格55.A4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5.A4" office:value-type="string">
            <text:p text:style-name="P32" loext:marker-style-name="T41"><text:span text:style-name="T48">O(log n) <text:s/></text:span><text:span text:style-name="T59">最均衡</text:span></text:p>
          </table:table-cell>
        </table:table-row>
      </table:table>
      <text:p text:style-name="P1"/>
      <text:h text:style-name="P18" text:outline-level="2" loext:marker-style-name="T17"><text:span text:style-name="T26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4" loext:marker-style-name="T41"><text:span text:style-name="T48">1. <text:s/>Heap = Complete BT + Heap Property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2. <text:s/>parent = A[⌊i/2⌋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3. <text:s/>left child = A[2i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4. <text:s/>right child = A[2i+1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5. <text:s/>Insert → Bubble Up → O(log n)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6. <text:s/>Delete/Extract → Heapify</text:span><text:span text:style-name="T59">（</text:span><text:span text:style-name="T48">Bubble Down</text:span><text:span text:style-name="T59">）→ </text:span><text:span text:style-name="T48">O(log n)</text:span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7. <text:s/>Build Heap</text:span><text:span text:style-name="T59">（</text:span><text:span text:style-name="T48">Bottom-Up</text:span><text:span text:style-name="T59">）</text:span><text:span text:style-name="T48">= O(n) <text:s/>★ </text:span><text:span text:style-name="T59">非 </text:span><text:span text:style-name="T48">O(n log n)</text:span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8. <text:s/>Heap Sort = O(n log n)</text:span><text:span text:style-name="T59">，</text:span><text:span text:style-name="T48">In-place</text:span><text:span text:style-name="T59">，</text:span><text:span text:style-name="T48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5T08:42:49.286000000</dc:date>
    <meta:editing-cycles>212</meta:editing-cycles>
    <meta:editing-duration>PT21H12M28S</meta:editing-duration>
    <meta:generator>MODA_ODF_Application_Tools/3.8.4.2$Windows_X86_64 LibreOffice_project/4fb77107d5af14329e08085efe4fa19b5633383a</meta:generator>
    <meta:document-statistic meta:table-count="56" meta:image-count="0" meta:object-count="0" meta:page-count="31" meta:paragraph-count="843" meta:word-count="7622" meta:character-count="19999" meta:non-whitespace-character-count="13218"/>
    <meta:user-defined meta:name="AppVersion">15.0000</meta:user-defined>
  </office:meta>
</office:document-meta>
</file>