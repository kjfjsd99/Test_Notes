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4e79" fo:padding-left="0.353cm" fo:padding-right="0.353cm" fo:padding-top="0.212cm" fo:padding-bottom="0.212cm" fo:border="none">
        <style:background-image/>
      </style:table-cell-properties>
    </style:style>
    <style:style style:name="表格2" style:family="table">
      <style:table-properties style:width="16.51cm" fo:margin-left="0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53cm" fo:padding-right="0.353cm" fo:padding-top="0.212cm" fo:padding-bottom="0.212cm" fo:border="none">
        <style:background-image/>
      </style:table-cell-properties>
    </style:style>
    <style:style style:name="表格3" style:family="table">
      <style:table-properties style:width="16.51cm" fo:margin-left="0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353cm" fo:padding-right="0.353cm" fo:padding-top="0.212cm" fo:padding-bottom="0.212cm" fo:border="none">
        <style:background-image/>
      </style:table-cell-properties>
    </style:style>
    <style:style style:name="表格4" style:family="table">
      <style:table-properties style:width="16.51cm" fo:margin-left="0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6e4f0" fo:padding-left="0.353cm" fo:padding-right="0.353cm" fo:padding-top="0.212cm" fo:padding-bottom="0.212cm" fo:border="none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3f4" fo:padding-left="0.353cm" fo:padding-right="0.353cm" fo:padding-top="0.212cm" fo:padding-bottom="0.212cm" fo:border="0.1pt solid #cccccc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2.752cm"/>
    </style:style>
    <style:style style:name="表格6.B" style:family="table-column">
      <style:table-column-properties style:column-width="3.457cm"/>
    </style:style>
    <style:style style:name="表格6.E" style:family="table-column">
      <style:table-column-properties style:column-width="3.387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4e79" fo:padding-left="0.212cm" fo:padding-right="0.212cm" fo:padding-top="0.141cm" fo:padding-bottom="0.141cm" fo:border="0.1pt solid #cccccc">
        <style:background-image/>
      </style:table-cell-properties>
    </style:style>
    <style:style style:name="表格6.B1" style:family="table-cell">
      <style:table-cell-properties style:vertical-align="middle" fo:background-color="#2e75b6" fo:padding-left="0.212cm" fo:padding-right="0.212cm" fo:padding-top="0.141cm" fo:padding-bottom="0.141cm" fo:border="0.1pt solid #cccccc">
        <style:background-image/>
      </style:table-cell-properties>
    </style:style>
    <style:style style:name="表格6.C1" style:family="table-cell">
      <style:table-cell-properties style:vertical-align="middle" fo:background-color="#c0550a" fo:padding-left="0.212cm" fo:padding-right="0.212cm" fo:padding-top="0.141cm" fo:padding-bottom="0.141cm" fo:border="0.1pt solid #cccccc">
        <style:background-image/>
      </style:table-cell-properties>
    </style:style>
    <style:style style:name="表格6.D1" style:family="table-cell">
      <style:table-cell-properties style:vertical-align="middle" fo:background-color="#148f77" fo:padding-left="0.212cm" fo:padding-right="0.212cm" fo:padding-top="0.141cm" fo:padding-bottom="0.141cm" fo:border="0.1pt solid #cccccc">
        <style:background-image/>
      </style:table-cell-properties>
    </style:style>
    <style:style style:name="表格6.E1" style:family="table-cell">
      <style:table-cell-properties style:vertical-align="middle" fo:background-color="#566573" fo:padding-left="0.212cm" fo:padding-right="0.212cm" fo:padding-top="0.141cm" fo:padding-bottom="0.141cm" fo:border="0.1pt solid #cccccc">
        <style:background-image/>
      </style:table-cell-properties>
    </style:style>
    <style:style style:name="表格6.A2" style:family="table-cell">
      <style:table-cell-properties fo:background-color="#f2f3f4" fo:padding-left="0.212cm" fo:padding-right="0.212cm" fo:padding-top="0.123cm" fo:padding-bottom="0.123cm" fo:border="0.1pt solid #cccccc">
        <style:background-image/>
      </style:table-cell-properties>
    </style:style>
    <style:style style:name="表格6.B2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6.C2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6.D2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6.E2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6.A3" style:family="table-cell">
      <style:table-cell-properties fo:background-color="#f2f3f4" fo:padding-left="0.212cm" fo:padding-right="0.212cm" fo:padding-top="0.123cm" fo:padding-bottom="0.123cm" fo:border="0.1pt solid #cccccc">
        <style:background-image/>
      </style:table-cell-properties>
    </style:style>
    <style:style style:name="表格6.B3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6.C3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6.D3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6.E3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6.A4" style:family="table-cell">
      <style:table-cell-properties fo:background-color="#f2f3f4" fo:padding-left="0.212cm" fo:padding-right="0.212cm" fo:padding-top="0.123cm" fo:padding-bottom="0.123cm" fo:border="0.1pt solid #cccccc">
        <style:background-image/>
      </style:table-cell-properties>
    </style:style>
    <style:style style:name="表格6.B4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6.C4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6.D4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6.E4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6.A5" style:family="table-cell">
      <style:table-cell-properties fo:background-color="#f2f3f4" fo:padding-left="0.212cm" fo:padding-right="0.212cm" fo:padding-top="0.123cm" fo:padding-bottom="0.123cm" fo:border="0.1pt solid #cccccc">
        <style:background-image/>
      </style:table-cell-properties>
    </style:style>
    <style:style style:name="表格6.B5" style:family="table-cell">
      <style:table-cell-properties fo:background-color="#d6e4f0" fo:padding-left="0.212cm" fo:padding-right="0.212cm" fo:padding-top="0.123cm" fo:padding-bottom="0.123cm" fo:border="0.1pt solid #cccccc">
        <style:background-image/>
      </style:table-cell-properties>
    </style:style>
    <style:style style:name="表格6.C5" style:family="table-cell">
      <style:table-cell-properties fo:background-color="#fdebd0" fo:padding-left="0.212cm" fo:padding-right="0.212cm" fo:padding-top="0.123cm" fo:padding-bottom="0.123cm" fo:border="0.1pt solid #cccccc">
        <style:background-image/>
      </style:table-cell-properties>
    </style:style>
    <style:style style:name="表格6.D5" style:family="table-cell">
      <style:table-cell-properties fo:background-color="#d5f5e3" fo:padding-left="0.212cm" fo:padding-right="0.212cm" fo:padding-top="0.123cm" fo:padding-bottom="0.123cm" fo:border="0.1pt solid #cccccc">
        <style:background-image/>
      </style:table-cell-properties>
    </style:style>
    <style:style style:name="表格6.E5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6.A6" style:family="table-cell">
      <style:table-cell-properties fo:background-color="#f2f3f4" fo:padding-left="0.212cm" fo:padding-right="0.212cm" fo:padding-top="0.123cm" fo:padding-bottom="0.123cm" fo:border="0.1pt solid #cccccc">
        <style:background-image/>
      </style:table-cell-properties>
    </style:style>
    <style:style style:name="表格6.B6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6.C6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6.D6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6.E6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7" style:family="table">
      <style:table-properties style:width="16.51cm" fo:margin-left="0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353cm" fo:padding-right="0.353cm" fo:padding-top="0.212cm" fo:padding-bottom="0.212cm" fo:border="none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2f3f4" fo:padding-left="0.353cm" fo:padding-right="0.353cm" fo:padding-top="0.212cm" fo:padding-bottom="0.212cm" fo:border="0.1pt solid #cccccc">
        <style:background-image/>
      </style:table-cell-properties>
    </style:style>
    <style:style style:name="表格9" style:family="table">
      <style:table-properties style:width="16.51cm" fo:margin-left="0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6e4f0" fo:padding-left="0.353cm" fo:padding-right="0.353cm" fo:padding-top="0.212cm" fo:padding-bottom="0.212cm" fo:border="none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2f3f4" fo:padding-left="0.353cm" fo:padding-right="0.353cm" fo:padding-top="0.212cm" fo:padding-bottom="0.212cm" fo:border="0.1pt solid #cccccc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.939cm"/>
    </style:style>
    <style:style style:name="表格11.B" style:family="table-column">
      <style:table-column-properties style:column-width="14.57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2e75b6" fo:padding-left="0.282cm" fo:padding-right="0.282cm" fo:padding-top="0.141cm" fo:padding-bottom="0.141cm" fo:border="0.1pt solid #cccccc">
        <style:background-image/>
      </style:table-cell-properties>
    </style:style>
    <style:style style:name="表格11.A2" style:family="table-cell">
      <style:table-cell-properties fo:background-color="#d6e4f0" fo:padding-left="0.212cm" fo:padding-right="0.212cm" fo:padding-top="0.176cm" fo:padding-bottom="0.176cm" fo:border="0.1pt solid #cccccc">
        <style:background-image/>
      </style:table-cell-properties>
    </style:style>
    <style:style style:name="表格11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.939cm"/>
    </style:style>
    <style:style style:name="表格12.B" style:family="table-column">
      <style:table-column-properties style:column-width="14.57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2e75b6" fo:padding-left="0.282cm" fo:padding-right="0.282cm" fo:padding-top="0.141cm" fo:padding-bottom="0.141cm" fo:border="0.1pt solid #cccccc">
        <style:background-image/>
      </style:table-cell-properties>
    </style:style>
    <style:style style:name="表格12.A2" style:family="table-cell">
      <style:table-cell-properties fo:background-color="#d6e4f0" fo:padding-left="0.212cm" fo:padding-right="0.212cm" fo:padding-top="0.176cm" fo:padding-bottom="0.176cm" fo:border="0.1pt solid #cccccc">
        <style:background-image/>
      </style:table-cell-properties>
    </style:style>
    <style:style style:name="表格12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.939cm"/>
    </style:style>
    <style:style style:name="表格13.B" style:family="table-column">
      <style:table-column-properties style:column-width="14.57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2e75b6" fo:padding-left="0.282cm" fo:padding-right="0.282cm" fo:padding-top="0.141cm" fo:padding-bottom="0.141cm" fo:border="0.1pt solid #cccccc">
        <style:background-image/>
      </style:table-cell-properties>
    </style:style>
    <style:style style:name="表格13.A2" style:family="table-cell">
      <style:table-cell-properties fo:background-color="#d6e4f0" fo:padding-left="0.212cm" fo:padding-right="0.212cm" fo:padding-top="0.176cm" fo:padding-bottom="0.176cm" fo:border="0.1pt solid #cccccc">
        <style:background-image/>
      </style:table-cell-properties>
    </style:style>
    <style:style style:name="表格13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14" style:family="table">
      <style:table-properties style:width="16.51cm" fo:margin-left="0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d5f5e3" fo:padding-left="0.353cm" fo:padding-right="0.353cm" fo:padding-top="0.212cm" fo:padding-bottom="0.212cm" fo:border="none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d5f5e3" fo:padding-left="0.353cm" fo:padding-right="0.353cm" fo:padding-top="0.212cm" fo:padding-bottom="0.212cm" fo:border="0.1pt solid #cccccc">
        <style:background-image/>
      </style:table-cell-properties>
    </style:style>
    <style:style style:name="表格16" style:family="table">
      <style:table-properties style:width="16.51cm" fo:margin-left="0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e2a3a" fo:padding-left="0.423cm" fo:padding-right="0.423cm" fo:padding-top="0.247cm" fo:padding-bottom="0.247cm" fo:border="none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3.704cm"/>
    </style:style>
    <style:style style:name="表格17.B" style:family="table-column">
      <style:table-column-properties style:column-width="3.879cm"/>
    </style:style>
    <style:style style:name="表格17.C" style:family="table-column">
      <style:table-column-properties style:column-width="3.881cm"/>
    </style:style>
    <style:style style:name="表格17.D" style:family="table-column">
      <style:table-column-properties style:column-width="5.045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4e79" fo:padding-left="0.212cm" fo:padding-right="0.212cm" fo:padding-top="0.141cm" fo:padding-bottom="0.141cm" fo:border="0.1pt solid #cccccc">
        <style:background-image/>
      </style:table-cell-properties>
    </style:style>
    <style:style style:name="表格17.A2" style:family="table-cell">
      <style:table-cell-properties fo:background-color="#f2f3f4" fo:padding-left="0.212cm" fo:padding-right="0.212cm" fo:padding-top="0.123cm" fo:padding-bottom="0.123cm" fo:border="0.1pt solid #cccccc">
        <style:background-image/>
      </style:table-cell-properties>
    </style:style>
    <style:style style:name="表格17.B2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17.C2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17.D2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17.A3" style:family="table-cell">
      <style:table-cell-properties fo:background-color="#f2f3f4" fo:padding-left="0.212cm" fo:padding-right="0.212cm" fo:padding-top="0.123cm" fo:padding-bottom="0.123cm" fo:border="0.1pt solid #cccccc">
        <style:background-image/>
      </style:table-cell-properties>
    </style:style>
    <style:style style:name="表格17.B3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17.C3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17.D3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18" style:family="table">
      <style:table-properties style:width="16.51cm" fo:margin-left="0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debd0" fo:padding-left="0.353cm" fo:padding-right="0.353cm" fo:padding-top="0.212cm" fo:padding-bottom="0.212cm" fo:border="none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debd0" fo:padding-left="0.353cm" fo:padding-right="0.353cm" fo:padding-top="0.212cm" fo:padding-bottom="0.212cm" fo:border="0.1pt solid #cccccc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2f3f4" fo:padding-left="0.353cm" fo:padding-right="0.353cm" fo:padding-top="0.212cm" fo:padding-bottom="0.212cm" fo:border="0.1pt solid #cccccc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.939cm"/>
    </style:style>
    <style:style style:name="表格21.B" style:family="table-column">
      <style:table-column-properties style:column-width="14.57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c0550a" fo:padding-left="0.282cm" fo:padding-right="0.282cm" fo:padding-top="0.141cm" fo:padding-bottom="0.141cm" fo:border="0.1pt solid #cccccc">
        <style:background-image/>
      </style:table-cell-properties>
    </style:style>
    <style:style style:name="表格21.A2" style:family="table-cell">
      <style:table-cell-properties fo:background-color="#fdebd0" fo:padding-left="0.212cm" fo:padding-right="0.212cm" fo:padding-top="0.176cm" fo:padding-bottom="0.176cm" fo:border="0.1pt solid #cccccc">
        <style:background-image/>
      </style:table-cell-properties>
    </style:style>
    <style:style style:name="表格21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.939cm"/>
    </style:style>
    <style:style style:name="表格22.B" style:family="table-column">
      <style:table-column-properties style:column-width="14.57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c0550a" fo:padding-left="0.282cm" fo:padding-right="0.282cm" fo:padding-top="0.141cm" fo:padding-bottom="0.141cm" fo:border="0.1pt solid #cccccc">
        <style:background-image/>
      </style:table-cell-properties>
    </style:style>
    <style:style style:name="表格22.A2" style:family="table-cell">
      <style:table-cell-properties fo:background-color="#fdebd0" fo:padding-left="0.212cm" fo:padding-right="0.212cm" fo:padding-top="0.176cm" fo:padding-bottom="0.176cm" fo:border="0.1pt solid #cccccc">
        <style:background-image/>
      </style:table-cell-properties>
    </style:style>
    <style:style style:name="表格22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.939cm"/>
    </style:style>
    <style:style style:name="表格23.B" style:family="table-column">
      <style:table-column-properties style:column-width="14.57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c0550a" fo:padding-left="0.282cm" fo:padding-right="0.282cm" fo:padding-top="0.141cm" fo:padding-bottom="0.141cm" fo:border="0.1pt solid #cccccc">
        <style:background-image/>
      </style:table-cell-properties>
    </style:style>
    <style:style style:name="表格23.A2" style:family="table-cell">
      <style:table-cell-properties fo:background-color="#fdebd0" fo:padding-left="0.212cm" fo:padding-right="0.212cm" fo:padding-top="0.176cm" fo:padding-bottom="0.176cm" fo:border="0.1pt solid #cccccc">
        <style:background-image/>
      </style:table-cell-properties>
    </style:style>
    <style:style style:name="表格23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1.939cm"/>
    </style:style>
    <style:style style:name="表格24.B" style:family="table-column">
      <style:table-column-properties style:column-width="14.57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c0392b" fo:padding-left="0.282cm" fo:padding-right="0.282cm" fo:padding-top="0.141cm" fo:padding-bottom="0.141cm" fo:border="0.1pt solid #cccccc">
        <style:background-image/>
      </style:table-cell-properties>
    </style:style>
    <style:style style:name="表格24.A2" style:family="table-cell">
      <style:table-cell-properties fo:background-color="#fadbd8" fo:padding-left="0.212cm" fo:padding-right="0.212cm" fo:padding-top="0.176cm" fo:padding-bottom="0.176cm" fo:border="0.1pt solid #cccccc">
        <style:background-image/>
      </style:table-cell-properties>
    </style:style>
    <style:style style:name="表格24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.939cm"/>
    </style:style>
    <style:style style:name="表格25.B" style:family="table-column">
      <style:table-column-properties style:column-width="14.57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c0392b" fo:padding-left="0.282cm" fo:padding-right="0.282cm" fo:padding-top="0.141cm" fo:padding-bottom="0.141cm" fo:border="0.1pt solid #cccccc">
        <style:background-image/>
      </style:table-cell-properties>
    </style:style>
    <style:style style:name="表格25.A2" style:family="table-cell">
      <style:table-cell-properties fo:background-color="#fadbd8" fo:padding-left="0.212cm" fo:padding-right="0.212cm" fo:padding-top="0.176cm" fo:padding-bottom="0.176cm" fo:border="0.1pt solid #cccccc">
        <style:background-image/>
      </style:table-cell-properties>
    </style:style>
    <style:style style:name="表格25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1.939cm"/>
    </style:style>
    <style:style style:name="表格26.B" style:family="table-column">
      <style:table-column-properties style:column-width="14.57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2e75b6" fo:padding-left="0.282cm" fo:padding-right="0.282cm" fo:padding-top="0.141cm" fo:padding-bottom="0.141cm" fo:border="0.1pt solid #cccccc">
        <style:background-image/>
      </style:table-cell-properties>
    </style:style>
    <style:style style:name="表格26.A2" style:family="table-cell">
      <style:table-cell-properties fo:background-color="#d5f5e3" fo:padding-left="0.212cm" fo:padding-right="0.212cm" fo:padding-top="0.176cm" fo:padding-bottom="0.176cm" fo:border="0.1pt solid #cccccc">
        <style:background-image/>
      </style:table-cell-properties>
    </style:style>
    <style:style style:name="表格26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27" style:family="table">
      <style:table-properties style:width="16.51cm" fo:margin-left="0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d5f5e3" fo:padding-left="0.353cm" fo:padding-right="0.353cm" fo:padding-top="0.212cm" fo:padding-bottom="0.212cm" fo:border="none">
        <style:background-image/>
      </style:table-cell-properties>
    </style:style>
    <style:style style:name="表格28" style:family="table">
      <style:table-properties style:width="16.51cm" fo:margin-left="0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1e2a3a" fo:padding-left="0.423cm" fo:padding-right="0.423cm" fo:padding-top="0.247cm" fo:padding-bottom="0.247cm" fo:border="none">
        <style:background-image/>
      </style:table-cell-properties>
    </style:style>
    <style:style style:name="表格29" style:family="table">
      <style:table-properties style:width="16.51cm" fo:margin-left="0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d5f5e3" fo:padding-left="0.353cm" fo:padding-right="0.353cm" fo:padding-top="0.212cm" fo:padding-bottom="0.212cm" fo:border="none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3f4" fo:padding-left="0.353cm" fo:padding-right="0.353cm" fo:padding-top="0.212cm" fo:padding-bottom="0.212cm" fo:border="0.1pt solid #cccccc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.939cm"/>
    </style:style>
    <style:style style:name="表格31.B" style:family="table-column">
      <style:table-column-properties style:column-width="14.57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2e75b6" fo:padding-left="0.282cm" fo:padding-right="0.282cm" fo:padding-top="0.141cm" fo:padding-bottom="0.141cm" fo:border="0.1pt solid #cccccc">
        <style:background-image/>
      </style:table-cell-properties>
    </style:style>
    <style:style style:name="表格31.A2" style:family="table-cell">
      <style:table-cell-properties fo:background-color="#d5f5e3" fo:padding-left="0.212cm" fo:padding-right="0.212cm" fo:padding-top="0.176cm" fo:padding-bottom="0.176cm" fo:border="0.1pt solid #cccccc">
        <style:background-image/>
      </style:table-cell-properties>
    </style:style>
    <style:style style:name="表格31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32" style:family="table">
      <style:table-properties style:width="16.51cm" fo:margin-left="0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5f5e3" fo:padding-left="0.353cm" fo:padding-right="0.353cm" fo:padding-top="0.212cm" fo:padding-bottom="0.212cm" fo:border="none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5f5e3" fo:padding-left="0.353cm" fo:padding-right="0.353cm" fo:padding-top="0.212cm" fo:padding-bottom="0.212cm" fo:border="0.1pt solid #cccccc">
        <style:background-image/>
      </style:table-cell-properties>
    </style:style>
    <style:style style:name="表格34" style:family="table">
      <style:table-properties style:width="16.51cm" fo:margin-left="0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1e2a3a" fo:padding-left="0.423cm" fo:padding-right="0.423cm" fo:padding-top="0.247cm" fo:padding-bottom="0.247cm" fo:border="none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d5f5e3" fo:padding-left="0.353cm" fo:padding-right="0.353cm" fo:padding-top="0.212cm" fo:padding-bottom="0.212cm" fo:border="0.1pt solid #cccccc">
        <style:background-image/>
      </style:table-cell-properties>
    </style:style>
    <style:style style:name="表格36" style:family="table">
      <style:table-properties style:width="16.51cm" fo:margin-left="0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3f4" fo:padding-left="0.353cm" fo:padding-right="0.353cm" fo:padding-top="0.212cm" fo:padding-bottom="0.212cm" fo:border="none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2f3f4" fo:padding-left="0.353cm" fo:padding-right="0.353cm" fo:padding-top="0.212cm" fo:padding-bottom="0.212cm" fo:border="0.1pt solid #cccccc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16.5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3f4" fo:padding-left="0.353cm" fo:padding-right="0.353cm" fo:padding-top="0.212cm" fo:padding-bottom="0.212cm" fo:border="0.1pt solid #cccccc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.939cm"/>
    </style:style>
    <style:style style:name="表格39.B" style:family="table-column">
      <style:table-column-properties style:column-width="14.57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c0550a" fo:padding-left="0.282cm" fo:padding-right="0.282cm" fo:padding-top="0.141cm" fo:padding-bottom="0.141cm" fo:border="0.1pt solid #cccccc">
        <style:background-image/>
      </style:table-cell-properties>
    </style:style>
    <style:style style:name="表格39.A2" style:family="table-cell">
      <style:table-cell-properties fo:background-color="#fdebd0" fo:padding-left="0.212cm" fo:padding-right="0.212cm" fo:padding-top="0.176cm" fo:padding-bottom="0.176cm" fo:border="0.1pt solid #cccccc">
        <style:background-image/>
      </style:table-cell-properties>
    </style:style>
    <style:style style:name="表格39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.939cm"/>
    </style:style>
    <style:style style:name="表格40.B" style:family="table-column">
      <style:table-column-properties style:column-width="14.57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c0550a" fo:padding-left="0.282cm" fo:padding-right="0.28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debd0" fo:padding-left="0.212cm" fo:padding-right="0.212cm" fo:padding-top="0.176cm" fo:padding-bottom="0.176cm" fo:border="0.1pt solid #cccccc">
        <style:background-image/>
      </style:table-cell-properties>
    </style:style>
    <style:style style:name="表格40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.939cm"/>
    </style:style>
    <style:style style:name="表格41.B" style:family="table-column">
      <style:table-column-properties style:column-width="14.57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c0392b" fo:padding-left="0.282cm" fo:padding-right="0.282cm" fo:padding-top="0.141cm" fo:padding-bottom="0.141cm" fo:border="0.1pt solid #cccccc">
        <style:background-image/>
      </style:table-cell-properties>
    </style:style>
    <style:style style:name="表格41.A2" style:family="table-cell">
      <style:table-cell-properties fo:background-color="#fadbd8" fo:padding-left="0.212cm" fo:padding-right="0.212cm" fo:padding-top="0.176cm" fo:padding-bottom="0.176cm" fo:border="0.1pt solid #cccccc">
        <style:background-image/>
      </style:table-cell-properties>
    </style:style>
    <style:style style:name="表格41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1.939cm"/>
    </style:style>
    <style:style style:name="表格42.B" style:family="table-column">
      <style:table-column-properties style:column-width="14.57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c0550a" fo:padding-left="0.282cm" fo:padding-right="0.282cm" fo:padding-top="0.141cm" fo:padding-bottom="0.141cm" fo:border="0.1pt solid #cccccc">
        <style:background-image/>
      </style:table-cell-properties>
    </style:style>
    <style:style style:name="表格42.A2" style:family="table-cell">
      <style:table-cell-properties fo:background-color="#fdebd0" fo:padding-left="0.212cm" fo:padding-right="0.212cm" fo:padding-top="0.176cm" fo:padding-bottom="0.176cm" fo:border="0.1pt solid #cccccc">
        <style:background-image/>
      </style:table-cell-properties>
    </style:style>
    <style:style style:name="表格42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.939cm"/>
    </style:style>
    <style:style style:name="表格43.B" style:family="table-column">
      <style:table-column-properties style:column-width="14.57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c0550a" fo:padding-left="0.282cm" fo:padding-right="0.282cm" fo:padding-top="0.141cm" fo:padding-bottom="0.141cm" fo:border="0.1pt solid #cccccc">
        <style:background-image/>
      </style:table-cell-properties>
    </style:style>
    <style:style style:name="表格43.A2" style:family="table-cell">
      <style:table-cell-properties fo:background-color="#fdebd0" fo:padding-left="0.212cm" fo:padding-right="0.212cm" fo:padding-top="0.176cm" fo:padding-bottom="0.176cm" fo:border="0.1pt solid #cccccc">
        <style:background-image/>
      </style:table-cell-properties>
    </style:style>
    <style:style style:name="表格43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.939cm"/>
    </style:style>
    <style:style style:name="表格44.B" style:family="table-column">
      <style:table-column-properties style:column-width="14.57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c0550a" fo:padding-left="0.282cm" fo:padding-right="0.28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debd0" fo:padding-left="0.212cm" fo:padding-right="0.212cm" fo:padding-top="0.176cm" fo:padding-bottom="0.176cm" fo:border="0.1pt solid #cccccc">
        <style:background-image/>
      </style:table-cell-properties>
    </style:style>
    <style:style style:name="表格44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.939cm"/>
    </style:style>
    <style:style style:name="表格45.B" style:family="table-column">
      <style:table-column-properties style:column-width="14.57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c0392b" fo:padding-left="0.282cm" fo:padding-right="0.282cm" fo:padding-top="0.141cm" fo:padding-bottom="0.141cm" fo:border="0.1pt solid #cccccc">
        <style:background-image/>
      </style:table-cell-properties>
    </style:style>
    <style:style style:name="表格45.A2" style:family="table-cell">
      <style:table-cell-properties fo:background-color="#fadbd8" fo:padding-left="0.212cm" fo:padding-right="0.212cm" fo:padding-top="0.176cm" fo:padding-bottom="0.176cm" fo:border="0.1pt solid #cccccc">
        <style:background-image/>
      </style:table-cell-properties>
    </style:style>
    <style:style style:name="表格45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.939cm"/>
    </style:style>
    <style:style style:name="表格46.B" style:family="table-column">
      <style:table-column-properties style:column-width="14.57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2e75b6" fo:padding-left="0.282cm" fo:padding-right="0.28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d5f5e3" fo:padding-left="0.212cm" fo:padding-right="0.212cm" fo:padding-top="0.176cm" fo:padding-bottom="0.176cm" fo:border="0.1pt solid #cccccc">
        <style:background-image/>
      </style:table-cell-properties>
    </style:style>
    <style:style style:name="表格46.B2" style:family="table-cell">
      <style:table-cell-properties fo:background-color="#ffffff" fo:padding-left="0.282cm" fo:padding-right="0.282cm" fo:padding-top="0.176cm" fo:padding-bottom="0.176cm" fo:border="0.1pt solid #cccccc">
        <style:background-image/>
      </style:table-cell-properties>
    </style:style>
    <style:style style:name="表格47" style:family="table">
      <style:table-properties style:width="16.51cm" fo:margin-left="0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5f5e3" fo:padding-left="0.353cm" fo:padding-right="0.353cm" fo:padding-top="0.212cm" fo:padding-bottom="0.212cm" fo:border="none">
        <style:background-image/>
      </style:table-cell-properties>
    </style:style>
    <style:style style:name="表格48" style:family="table">
      <style:table-properties style:width="16.51cm" fo:margin-left="0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6e4f0" fo:padding-left="0.353cm" fo:padding-right="0.353cm" fo:padding-top="0.212cm" fo:padding-bottom="0.212cm" fo:border="none">
        <style:background-image/>
      </style:table-cell-properties>
    </style:style>
    <style:style style:name="表格49" style:family="table">
      <style:table-properties style:width="16.51cm" fo:margin-left="0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debd0" fo:padding-left="0.353cm" fo:padding-right="0.353cm" fo:padding-top="0.212cm" fo:padding-bottom="0.212cm" fo:border="none">
        <style:background-image/>
      </style:table-cell-properties>
    </style:style>
    <style:style style:name="表格50" style:family="table">
      <style:table-properties style:width="16.51cm" fo:margin-left="0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d5f5e3" fo:padding-left="0.353cm" fo:padding-right="0.353cm" fo:padding-top="0.212cm" fo:padding-bottom="0.212cm" fo:border="none">
        <style:background-image/>
      </style:table-cell-properties>
    </style:style>
    <style:style style:name="表格51" style:family="table">
      <style:table-properties style:width="16.51cm" fo:margin-left="0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6e4f0" fo:padding-left="0.353cm" fo:padding-right="0.353cm" fo:padding-top="0.212cm" fo:padding-bottom="0.212cm" fo:border="none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3.173cm"/>
    </style:style>
    <style:style style:name="表格52.B" style:family="table-column">
      <style:table-column-properties style:column-width="3.175cm"/>
    </style:style>
    <style:style style:name="表格52.C" style:family="table-column">
      <style:table-column-properties style:column-width="3.882cm"/>
    </style:style>
    <style:style style:name="表格52.E" style:family="table-column">
      <style:table-column-properties style:column-width="3.104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4e79" fo:padding-left="0.212cm" fo:padding-right="0.212cm" fo:padding-top="0.141cm" fo:padding-bottom="0.141cm" fo:border="0.1pt solid #cccccc">
        <style:background-image/>
      </style:table-cell-properties>
    </style:style>
    <style:style style:name="表格52.B1" style:family="table-cell">
      <style:table-cell-properties style:vertical-align="middle" fo:background-color="#2e75b6" fo:padding-left="0.212cm" fo:padding-right="0.212cm" fo:padding-top="0.141cm" fo:padding-bottom="0.141cm" fo:border="0.1pt solid #cccccc">
        <style:background-image/>
      </style:table-cell-properties>
    </style:style>
    <style:style style:name="表格52.C1" style:family="table-cell">
      <style:table-cell-properties style:vertical-align="middle" fo:background-color="#c0550a" fo:padding-left="0.212cm" fo:padding-right="0.212cm" fo:padding-top="0.141cm" fo:padding-bottom="0.141cm" fo:border="0.1pt solid #cccccc">
        <style:background-image/>
      </style:table-cell-properties>
    </style:style>
    <style:style style:name="表格52.D1" style:family="table-cell">
      <style:table-cell-properties style:vertical-align="middle" fo:background-color="#148f77" fo:padding-left="0.212cm" fo:padding-right="0.212cm" fo:padding-top="0.141cm" fo:padding-bottom="0.141cm" fo:border="0.1pt solid #cccccc">
        <style:background-image/>
      </style:table-cell-properties>
    </style:style>
    <style:style style:name="表格52.E1" style:family="table-cell">
      <style:table-cell-properties style:vertical-align="middle" fo:background-color="#566573" fo:padding-left="0.212cm" fo:padding-right="0.212cm" fo:padding-top="0.141cm" fo:padding-bottom="0.141cm" fo:border="0.1pt solid #cccccc">
        <style:background-image/>
      </style:table-cell-properties>
    </style:style>
    <style:style style:name="表格52.A2" style:family="table-cell">
      <style:table-cell-properties fo:background-color="#f2f3f4" fo:padding-left="0.212cm" fo:padding-right="0.212cm" fo:padding-top="0.123cm" fo:padding-bottom="0.123cm" fo:border="0.1pt solid #cccccc">
        <style:background-image/>
      </style:table-cell-properties>
    </style:style>
    <style:style style:name="表格52.B2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52.C2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52.D2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52.E2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52.A3" style:family="table-cell">
      <style:table-cell-properties fo:background-color="#f2f3f4" fo:padding-left="0.212cm" fo:padding-right="0.212cm" fo:padding-top="0.123cm" fo:padding-bottom="0.123cm" fo:border="0.1pt solid #cccccc">
        <style:background-image/>
      </style:table-cell-properties>
    </style:style>
    <style:style style:name="表格52.B3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52.C3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52.D3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52.E3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52.A4" style:family="table-cell">
      <style:table-cell-properties fo:background-color="#f2f3f4" fo:padding-left="0.212cm" fo:padding-right="0.212cm" fo:padding-top="0.123cm" fo:padding-bottom="0.123cm" fo:border="0.1pt solid #cccccc">
        <style:background-image/>
      </style:table-cell-properties>
    </style:style>
    <style:style style:name="表格52.B4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52.C4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52.D4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52.E4" style:family="table-cell">
      <style:table-cell-properties fo:background-color="#ffffff" fo:padding-left="0.212cm" fo:padding-right="0.212cm" fo:padding-top="0.123cm" fo:padding-bottom="0.123cm" fo:border="0.1pt solid #cccccc">
        <style:background-image/>
      </style:table-cell-properties>
    </style:style>
    <style:style style:name="表格53" style:family="table">
      <style:table-properties style:width="16.51cm" fo:margin-left="0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d5f5e3" fo:padding-left="0.353cm" fo:padding-right="0.353cm" fo:padding-top="0.212cm" fo:padding-bottom="0.212cm" fo:border="none">
        <style:background-image/>
      </style:table-cell-properties>
    </style:style>
    <style:style style:name="P1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25pt solid #2e75b6"/>
    </style:style>
    <style:style style:name="P2" style:family="paragraph" style:parent-style-name="Heading_20_1">
      <style:paragraph-properties fo:margin-top="0cm" fo:margin-bottom="0.212cm" style:contextual-spacing="false" fo:padding-left="0cm" fo:padding-right="0cm" fo:padding-top="0cm" fo:padding-bottom="0.141cm" fo:border-left="none" fo:border-right="none" fo:border-top="none" fo:border-bottom="1.25pt solid #2e75b6"/>
    </style:style>
    <style:style style:name="P3" style:family="paragraph" style:parent-style-name="Heading_20_2">
      <style:paragraph-properties fo:margin-top="0.388cm" fo:margin-bottom="0.141cm" style:contextual-spacing="false"/>
    </style:style>
    <style:style style:name="P4" style:family="paragraph" style:parent-style-name="List_20_Paragraph" style:list-style-name="WWNum2">
      <style:paragraph-properties fo:margin-top="0.064cm" fo:margin-bottom="0.064cm" style:contextual-spacing="false"/>
    </style:style>
    <style:style style:name="P5" style:family="paragraph" style:parent-style-name="Standard">
      <style:paragraph-properties fo:margin-top="0.353cm" fo:margin-bottom="0.141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9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10" style:family="paragraph" style:parent-style-name="Standard">
      <style:paragraph-properties fo:margin-top="0cm" fo:margin-bottom="0.141cm" style:contextual-spacing="false" fo:text-align="center" style:justify-single-word="false"/>
    </style:style>
    <style:style style:name="P11" style:family="paragraph" style:parent-style-name="Standard">
      <style:paragraph-properties fo:margin-top="0.141cm" fo:margin-bottom="0cm" style:contextual-spacing="false"/>
    </style:style>
    <style:style style:name="P12" style:family="paragraph" style:parent-style-name="Standard">
      <style:paragraph-properties fo:margin-top="0cm" fo:margin-bottom="0.071cm" style:contextual-spacing="false" fo:text-align="start" style:justify-single-word="false"/>
    </style:style>
    <style:style style:name="P13" style:family="paragraph" style:parent-style-name="Standard">
      <style:paragraph-properties fo:margin-top="0.106cm" fo:margin-bottom="0.106cm" style:contextual-spacing="false" fo:text-align="start" style:justify-single-word="false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5" style:family="paragraph" style:parent-style-name="Standard">
      <style:paragraph-properties fo:margin-top="0.106cm" fo:margin-bottom="0cm" style:contextual-spacing="false"/>
    </style:style>
    <style:style style:name="P16" style:family="paragraph" style:parent-style-name="Standard">
      <style:paragraph-properties fo:margin-top="0.053cm" fo:margin-bottom="0cm" style:contextual-spacing="false"/>
    </style:style>
    <style:style style:name="P17" style:family="paragraph" style:parent-style-name="Standard">
      <style:paragraph-properties fo:margin-top="0.035cm" fo:margin-bottom="0cm" style:contextual-spacing="false"/>
    </style:style>
    <style:style style:name="P18" style:family="paragraph" style:parent-style-name="Standard">
      <style:paragraph-properties fo:margin-top="0.021cm" fo:margin-bottom="0.021cm" style:contextual-spacing="false"/>
    </style:style>
    <style:style style:name="P19" style:family="paragraph" style:parent-style-name="Standard">
      <style:paragraph-properties fo:margin-top="0.071cm" fo:margin-bottom="0cm" style:contextual-spacing="false"/>
    </style:style>
    <style:style style:name="P20" style:family="paragraph" style:parent-style-name="Standard">
      <style:paragraph-properties fo:margin-top="0.042cm" fo:margin-bottom="0.042cm" style:contextual-spacing="false"/>
    </style:style>
    <style:style style:name="P21" style:family="paragraph" style:parent-style-name="Standard">
      <style:paragraph-properties fo:margin-top="0.026cm" fo:margin-bottom="0.026cm" style:contextual-spacing="false"/>
    </style:style>
    <style:style style:name="P22" style:family="paragraph" style:parent-style-name="Standard">
      <style:paragraph-properties fo:margin-top="0.044cm" fo:margin-bottom="0cm" style:contextual-spacing="false"/>
    </style:style>
    <style:style style:name="P23" style:family="paragraph" style:parent-style-name="Standard">
      <style:paragraph-properties fo:margin-top="0.176cm" fo:margin-bottom="0.176cm" style:contextual-spacing="false" fo:padding-left="0cm" fo:padding-right="0cm" fo:padding-top="0cm" fo:padding-bottom="0.035cm" fo:border-left="none" fo:border-right="none" fo:border-top="none" fo:border-bottom="0.51pt solid #d6e4f0"/>
    </style:style>
    <style:style style:name="T1" style:family="text">
      <style:text-properties fo:color="#ffffff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T2" style:family="text"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3" style:family="text"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4" style:family="text">
      <style:text-properties fo:color="#aed6f1" loext:opacity="100%" style:font-name="Arial" fo:font-size="13pt" fo:font-weight="normal" style:font-name-asian="Arial3" style:font-size-asian="13pt" style:font-weight-asian="normal" style:font-name-complex="Arial3" style:font-size-complex="13pt" style:font-weight-complex="normal"/>
    </style:style>
    <style:style style:name="T5" style:family="text">
      <style:text-properties fo:color="#aed6f1" loext:opacity="100%" style:font-name="Arial" fo:font-size="10.5pt" fo:font-weight="normal" style:font-name-asian="Arial3" style:font-size-asian="10.5pt" style:font-weight-asian="normal" style:font-name-complex="Arial3" style:font-size-complex="10.5pt" style:font-weight-complex="normal"/>
    </style:style>
    <style:style style:name="T6" style:family="text">
      <style:text-properties fo:color="#d6eaf8" loext:opacity="100%" style:font-name="Arial" fo:font-size="12pt" fo:font-weight="normal" style:font-name-asian="Arial3" style:font-size-asian="12pt" style:font-weight-asian="normal" style:font-name-complex="Arial3" style:font-size-complex="12pt" style:font-weight-complex="normal"/>
    </style:style>
    <style:style style:name="T7" style:family="text">
      <style:text-properties fo:color="#1f4e79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8" style:family="text">
      <style:text-properties fo:color="#1f4e79" loext:opacity="100%" style:font-name="Arial" fo:font-size="17pt" fo:font-weight="bold" style:font-name-asian="Arial3" style:font-size-asian="17pt" style:font-weight-asian="bold" style:font-name-complex="Arial3" style:font-size-complex="17pt" style:font-weight-complex="bold"/>
    </style:style>
    <style:style style:name="T9" style:family="text">
      <style:text-properties fo:color="#1f4e79" loext:opacity="100%" style:font-name="Arial" fo:font-size="11.5pt" fo:font-weight="bold" style:font-name-asian="Arial3" style:font-size-asian="11.5pt" style:font-weight-asian="bold" style:font-name-complex="Arial3" style:font-size-complex="11.5pt" style:font-weight-complex="bold"/>
    </style:style>
    <style:style style:name="T10" style:family="text">
      <style:text-properties fo:color="#1f4e79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11" style:family="text">
      <style:text-properties fo:color="#1c1c1c" loext:opacity="100%" style:font-name="Arial" fo:font-size="10.5pt" fo:font-weight="normal" style:font-name-asian="Arial3" style:font-size-asian="10.5pt" style:font-weight-asian="normal" style:font-name-complex="Arial3" style:font-size-complex="10.5pt" style:font-weight-complex="normal"/>
    </style:style>
    <style:style style:name="T12" style:family="text">
      <style:text-properties fo:color="#1c1c1c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13" style:family="text">
      <style:text-properties fo:color="#1c1c1c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4" style:family="text">
      <style:text-properties fo:color="#1c1c1c" loext:opacity="100%" style:font-name="Arial" fo:font-size="9.5pt" fo:font-weight="bold" style:font-name-asian="Arial3" style:font-size-asian="9.5pt" style:font-weight-asian="bold" style:font-name-complex="Arial3" style:font-size-complex="9.5pt" style:font-weight-complex="bold"/>
    </style:style>
    <style:style style:name="T15" style:family="text">
      <style:text-properties fo:color="#1c1c1c" loext:opacity="100%" style:font-name="Arial" fo:font-size="9.5pt" fo:font-weight="normal" style:font-name-asian="Arial3" style:font-size-asian="9.5pt" style:font-weight-asian="normal" style:font-name-complex="Arial3" style:font-size-complex="9.5pt" style:font-weight-complex="normal"/>
    </style:style>
    <style:style style:name="T16" style:family="text">
      <style:text-properties fo:color="#1c1c1c" loext:opacity="100%" style:font-name="Arial" fo:font-size="12pt" fo:font-weight="normal" style:font-name-asian="Arial3" style:font-size-asian="12pt" style:font-weight-asian="normal" style:font-name-complex="Arial3" style:font-size-complex="12pt" style:font-weight-complex="normal"/>
    </style:style>
    <style:style style:name="T17" style:family="text">
      <style:text-properties fo:color="#1c1c1c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18" style:family="text">
      <style:text-properties fo:color="#1c1c1c" loext:opacity="100%" style:font-name="Courier New" fo:font-size="9.5pt" fo:font-weight="normal" style:font-name-asian="Courier New1" style:font-size-asian="9.5pt" style:font-weight-asian="normal" style:font-name-complex="Courier New1" style:font-size-complex="9.5pt" style:font-weight-complex="normal"/>
    </style:style>
    <style:style style:name="T19" style:family="text">
      <style:text-properties fo:color="#2e75b6" loext:opacity="100%" style:font-name="Arial" fo:font-size="13.5pt" fo:font-weight="bold" style:font-name-asian="Arial3" style:font-size-asian="13.5pt" style:font-weight-asian="bold" style:font-name-complex="Arial3" style:font-size-complex="13.5pt" style:font-weight-complex="bold"/>
    </style:style>
    <style:style style:name="T20" style:family="text">
      <style:text-properties fo:color="#2e75b6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21" style:family="text">
      <style:text-properties fo:color="#2e75b6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22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23" style:family="text">
      <style:text-properties fo:color="#56657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24" style:family="text">
      <style:text-properties fo:color="#566573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T25" style:family="text">
      <style:text-properties fo:color="#566573" loext:opacity="100%" style:font-name="Arial" fo:font-size="9pt" fo:font-weight="normal" style:font-name-asian="Arial3" style:font-size-asian="9pt" style:font-weight-asian="normal" style:font-name-complex="Arial3" style:font-size-complex="9pt" style:font-weight-complex="normal"/>
    </style:style>
    <style:style style:name="T26" style:family="text">
      <style:text-properties fo:color="#c0550a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27" style:family="text">
      <style:text-properties fo:color="#c0550a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28" style:family="text">
      <style:text-properties fo:color="#c0550a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29" style:family="text">
      <style:text-properties fo:color="#148f77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30" style:family="text">
      <style:text-properties fo:color="#148f77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31" style:family="text">
      <style:text-properties fo:color="#1e8449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32" style:family="text">
      <style:text-properties fo:color="#1e8449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33" style:family="text">
      <style:text-properties fo:color="#1e8449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34" style:family="text">
      <style:text-properties fo:color="#1e844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35" style:family="text">
      <style:text-properties fo:color="#e8f4fd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T36" style:family="text">
      <style:text-properties fo:color="#c0392b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37" style:family="text">
      <style:text-properties fo:color="#c0392b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T38" style:family="text">
      <style:text-properties fo:color="#c0392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39" style:family="text">
      <style:text-properties fo:color="#c0392b" loext:opacity="100%" style:font-name="Arial" fo:font-size="15pt" fo:font-weight="bold" style:font-name-asian="Arial3" style:font-size-asian="15pt" style:font-weight-asian="bold" style:font-name-complex="Arial3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5"><text:span text:style-name="T1">【第15章】最小擴張樹 MST</text:span></text:p>
            <text:p text:style-name="P6"><text:span text:style-name="T4">Minimum Spanning Tree</text:span></text:p>
            <text:p text:style-name="P6"><text:span text:style-name="T6">Prim ／ Kruskal ／ Sollin（Borůvka）</text:span></text:p>
            <text:p text:style-name="P7"><text:span text:style-name="T5">圖解 <text:s/>逐步推導 <text:s/>程式實作 <text:s/>公職考試完整版</text:span></text:p>
          </table:table-cell>
        </table:table-row>
      </table:table>
      <text:p text:style-name="P11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2"><text:span text:style-name="T7">📖 本章學習地圖</text:span></text:p>
            <text:p text:style-name="P13"><text:span text:style-name="T11">第一章：MST 是什麼？基本概念 + 名詞解釋</text:span></text:p>
            <text:p text:style-name="P13"><text:span text:style-name="T11">第二章：三種演算法快速比較表</text:span></text:p>
            <text:p text:style-name="P13"><text:span text:style-name="T11">第三章：Prim 演算法 ── 圖解 + 逐步推導 + Python 程式碼</text:span></text:p>
            <text:p text:style-name="P13"><text:span text:style-name="T11">第四章：Kruskal 演算法 ── 圖解 + Union-Find + Python 程式碼</text:span></text:p>
            <text:p text:style-name="P13"><text:span text:style-name="T11">第五章：Sollin 演算法 ── 圖解 + 逐步推導 + Python 程式碼</text:span></text:p>
            <text:p text:style-name="P13"><text:span text:style-name="T11">第六章：113閩 Q5 公職真題完整解題</text:span></text:p>
            <text:p text:style-name="P14"><text:span text:style-name="T11">第七章：考試速查卡（背誦版）</text:span></text:p>
          </table:table-cell>
        </table:table-row>
      </table:table>
      <text:p text:style-name="Standard"/>
      <text:h text:style-name="P1" text:outline-level="1"><text:span text:style-name="T8">一、MST 基本概念 ── 新手從這裡開始</text:span></text:h>
      <text:h text:style-name="P3" text:outline-level="2"><text:span text:style-name="T19">1-1 先搞懂名詞：圖、節點、邊、權重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3"><text:span text:style-name="T7">📌 新手名詞解釋（一定要先懂這些！）</text:span></text:p>
            <text:p text:style-name="P13"><text:span text:style-name="T20">圖（Graph）：</text:span><text:span text:style-name="T12">由「點」和「線」組成的一種資料結構。例如：城市地圖就是一個圖。</text:span></text:p>
            <text:p text:style-name="P13"><text:span text:style-name="T20">節點（Node / Vertex）：</text:span><text:span text:style-name="T12">圖裡面的每個點。例如：城市 A、B、C。</text:span></text:p>
            <text:p text:style-name="P13"><text:span text:style-name="T20">邊（Edge）：</text:span><text:span text:style-name="T12">連接兩個節點的線段。例如：A 到 B 的道路。</text:span></text:p>
            <text:p text:style-name="P13"><text:span text:style-name="T20">權重（Weight）：</text:span><text:span text:style-name="T12">邊上的數字，代表距離、費用、時間等。例如：A 到 B 要走 3 公里。</text:span></text:p>
            <text:p text:style-name="P13"><text:span text:style-name="T20">連通圖（Connected Graph）：</text:span><text:span text:style-name="T12">任兩個節點之間都找得到路徑可以互達，不能有孤立點。</text:span></text:p>
          </table:table-cell>
        </table:table-row>
      </table:table>
      <text:p text:style-name="P15"/>
      <text:h text:style-name="P3" text:outline-level="2"><text:span text:style-name="T19">1-2 MST 的定義</text:span></text:h>
      <text:p text:style-name="P13"><text:span text:style-name="T12">想像你要在 4 個城市之間鋪設電纜，每兩個城市之間都可以連線，但每條線有建設費用。你想「用最低費用，讓每個城市都連通」── 這就是 MST 要解決的問題！</text:span></text:p>
      <text:p text:style-name="P15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3"><text:span text:style-name="T9">MST 必須同時滿足以下 3 個條件：</text:span></text:p>
            <text:p text:style-name="P16"/>
            <text:p text:style-name="P13"><text:span text:style-name="T20">① 恰好 V-1 條邊</text:span><text:span text:style-name="T12">（V = 節點總數，例如 4 個節點就要選 3 條邊）</text:span></text:p>
            <text:p text:style-name="P13"><text:span text:style-name="T23"><text:s text:c="3"/>為什麼？</text:span><text:span text:style-name="T12">少一條 → 必有城市沒被接到電纜；多一條 → 必形成迴路（浪費）。</text:span></text:p>
            <text:p text:style-name="P17"/>
            <text:p text:style-name="P13"><text:span text:style-name="T20">② 無 Cycle（無迴路）</text:span><text:span text:style-name="T12">（不能有「繞圈」的連法）</text:span></text:p>
            <text:p text:style-name="P13"><text:span text:style-name="T23"><text:s text:c="3"/>為什麼？</text:span><text:span text:style-name="T12">若 A─B─C─A 形成三角形，去掉最貴那條，三城市依然連通，且費用更低。</text:span></text:p>
            <text:p text:style-name="P17"/>
            <text:p text:style-name="P13"><text:span text:style-name="T20">③ 覆蓋所有節點</text:span><text:span text:style-name="T12">（每個城市都要被電纜接到）</text:span></text:p>
            <text:p text:style-name="P13"><text:span text:style-name="T23"><text:s text:c="3"/>前提：</text:span><text:span text:style-name="T12">圖必須是「連通圖」，才保證 MST 存在。</text:span></text:p>
          </table:table-cell>
        </table:table-row>
      </table:table>
      <text:p text:style-name="P11"/>
      <text:h text:style-name="P3" text:outline-level="2"><text:span text:style-name="T19">1-3 圖解：原始圖 vs MST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8"><text:span text:style-name="T18"><text:s text:c="2"/>原始圖（所有邊）： <text:s text:c="18"/>MST（花最少錢連通所有城市）：</text:span></text:p>
            <text:p text:style-name="P18"/>
            <text:p text:style-name="P18"><text:span text:style-name="T18"><text:s text:c="10"/>A <text:s text:c="37"/>A</text:span></text:p>
            <text:p text:style-name="P18"><text:span text:style-name="T18"><text:s text:c="9"/>/ \ <text:s text:c="35"/>/</text:span></text:p>
            <text:p text:style-name="P18"><text:span text:style-name="T18"><text:s text:c="8"/>1 <text:s text:c="2"/>4 <text:s text:c="4"/>← 4條邊 <text:s text:c="14"/>1 <text:s text:c="5"/>← 只選3條最便宜的邊</text:span></text:p>
            <text:p text:style-name="P18"><text:span text:style-name="T18"><text:s text:c="7"/>/ <text:s text:c="4"/>\ <text:s text:c="25"/>/</text:span></text:p>
            <text:p text:style-name="P18"><text:span text:style-name="T18"><text:s text:c="6"/>B --2-- C <text:s text:c="23"/>B --2-- C</text:span></text:p>
            <text:p text:style-name="P18"><text:span text:style-name="T18"><text:s text:c="7"/>\ <text:s text:c="4"/>/ <text:s text:c="33"/>\</text:span></text:p>
            <text:p text:style-name="P18"><text:span text:style-name="T18"><text:s text:c="8"/>5 <text:s text:c="2"/>3 <text:s text:c="35"/>3</text:span></text:p>
            <text:p text:style-name="P18"><text:span text:style-name="T18"><text:s text:c="9"/>\ / <text:s text:c="37"/>\</text:span></text:p>
            <text:p text:style-name="P18"><text:span text:style-name="T18"><text:s text:c="10"/>D <text:s text:c="39"/>D</text:span></text:p>
            <text:p text:style-name="P18"/>
            <text:p text:style-name="P18"><text:span text:style-name="T18"><text:s text:c="2"/>邊清單：AB=1, AC=4, BC=2, BD=5, CD=3</text:span></text:p>
            <text:p text:style-name="P18"/>
            <text:p text:style-name="P18"><text:span text:style-name="T18"><text:s text:c="2"/>✅ MST 邊：AB=1, BC=2, CD=3 <text:s text:c="8"/>總費用 = 1+2+3 = 6（最省！）</text:span></text:p>
            <text:p text:style-name="P18"><text:span text:style-name="T18"><text:s text:c="2"/>❌ 不選 AC=4：若選了，A─B─C─A 形成迴路，而且費用還比較貴</text:span></text:p>
            <text:p text:style-name="P18"><text:span text:style-name="T18"><text:s text:c="2"/>❌ 不選 BD=5：若選了，B─C─D─B 形成迴路，同樣多此一舉</text:span></text:p>
            <text:p text:style-name="P18"><text:soft-page-break/></text:p>
            <text:p text:style-name="P18"><text:span text:style-name="T18"><text:s text:c="2"/>驗證：4個節點 → V-1 = 3 條邊 <text:s/>✅ <text:s/>無迴路 <text:s/>✅ <text:s/>覆蓋 A,B,C,D <text:s/>✅</text:span></text:p>
          </table:table-cell>
        </table:table-row>
      </table:table>
      <text:p text:style-name="P11"/>
      <text:h text:style-name="P3" text:outline-level="2"><text:span text:style-name="T19">1-4 為什麼連通圖才有 MST？</text:span></text:h>
      <text:p text:style-name="P13"><text:span text:style-name="T12">假設圖有兩個完全分開的部分（A-B 和 C-D，中間沒有任何邊相連），那麼 A 永遠無法到達 C，也就不可能用任何方式把它們都連起來，MST 就不存在了。這時候只能各自做「最小擴張森林（Minimum Spanning Forest）」。</text:span></text:p>
      <text:h text:style-name="P2" text:outline-level="1"><text:span text:style-name="T8">二、三種 MST 演算法快速比較</text:span></text:h>
      <text:p text:style-name="P19"/>
      <text:p text:style-name="P13"><text:span text:style-name="T12">求 MST 有三種主流演算法，它們的「切入點」不同：Prim 從點出發、Kruskal 從邊出發、Sollin 全體同時出發。</text:span></text:p>
      <text:p text:style-name="P15"/>
      <table:table table:name="表格6" table:style-name="表格6">
        <table:table-column table:style-name="表格6.A"/>
        <table:table-column table:style-name="表格6.B" table:number-columns-repeated="3"/>
        <table:table-column table:style-name="表格6.E"/>
        <table:table-row table:style-name="表格6.1">
          <table:table-cell table:style-name="表格6.A1" office:value-type="string">
            <text:p text:style-name="P8"><text:span text:style-name="T2">比較項目</text:span></text:p>
          </table:table-cell>
          <table:table-cell table:style-name="表格6.B1" office:value-type="string">
            <text:p text:style-name="P8"><text:span text:style-name="T2">Prim</text:span></text:p>
          </table:table-cell>
          <table:table-cell table:style-name="表格6.C1" office:value-type="string">
            <text:p text:style-name="P8"><text:span text:style-name="T2">Kruskal</text:span></text:p>
          </table:table-cell>
          <table:table-cell table:style-name="表格6.D1" office:value-type="string">
            <text:p text:style-name="P8"><text:span text:style-name="T2">Sollin（Borůvka）</text:span></text:p>
          </table:table-cell>
          <table:table-cell table:style-name="表格6.E1" office:value-type="string">
            <text:p text:style-name="P8"><text:span text:style-name="T2">MST 共同特性</text:span></text:p>
          </table:table-cell>
        </table:table-row>
        <table:table-row table:style-name="表格6.1">
          <table:table-cell table:style-name="表格6.A2" office:value-type="string">
            <text:p text:style-name="P14"><text:span text:style-name="T14">出發點</text:span></text:p>
          </table:table-cell>
          <table:table-cell table:style-name="表格6.B2" office:value-type="string">
            <text:p text:style-name="P14"><text:span text:style-name="T15">從「一個節點」開始往外長</text:span></text:p>
          </table:table-cell>
          <table:table-cell table:style-name="表格6.C2" office:value-type="string">
            <text:p text:style-name="P14"><text:span text:style-name="T15">從「最小邊」開始一條條挑</text:span></text:p>
          </table:table-cell>
          <table:table-cell table:style-name="表格6.D2" office:value-type="string">
            <text:p text:style-name="P14"><text:span text:style-name="T15">從「所有節點」同時出發</text:span></text:p>
          </table:table-cell>
          <table:table-cell table:style-name="表格6.E2" office:value-type="string">
            <text:p text:style-name="P14"><text:span text:style-name="T15">V-1 條邊，無 Cycle</text:span></text:p>
          </table:table-cell>
        </table:table-row>
        <table:table-row table:style-name="表格6.1">
          <table:table-cell table:style-name="表格6.A3" office:value-type="string">
            <text:p text:style-name="P14"><text:span text:style-name="T14">核心工具</text:span></text:p>
          </table:table-cell>
          <table:table-cell table:style-name="表格6.B3" office:value-type="string">
            <text:p text:style-name="P14"><text:span text:style-name="T15">Min-Heap 或矩陣</text:span></text:p>
          </table:table-cell>
          <table:table-cell table:style-name="表格6.C3" office:value-type="string">
            <text:p text:style-name="P14"><text:span text:style-name="T15">Union-Find（並查集）</text:span></text:p>
          </table:table-cell>
          <table:table-cell table:style-name="表格6.D3" office:value-type="string">
            <text:p text:style-name="P14"><text:span text:style-name="T15">Component 清單</text:span></text:p>
          </table:table-cell>
          <table:table-cell table:style-name="表格6.E3" office:value-type="string">
            <text:p text:style-name="P14"><text:span text:style-name="T15">連通圖才存在</text:span></text:p>
          </table:table-cell>
        </table:table-row>
        <table:table-row table:style-name="表格6.1">
          <table:table-cell table:style-name="表格6.A4" office:value-type="string">
            <text:p text:style-name="P14"><text:span text:style-name="T14">時間複雜度</text:span></text:p>
          </table:table-cell>
          <table:table-cell table:style-name="表格6.B4" office:value-type="string">
            <text:p text:style-name="P14"><text:span text:style-name="T15">O(V²) 或 O(E log V)</text:span></text:p>
          </table:table-cell>
          <table:table-cell table:style-name="表格6.C4" office:value-type="string">
            <text:p text:style-name="P14"><text:span text:style-name="T15">O(E log E)</text:span></text:p>
          </table:table-cell>
          <table:table-cell table:style-name="表格6.D4" office:value-type="string">
            <text:p text:style-name="P14"><text:span text:style-name="T15">O(E log V)</text:span></text:p>
          </table:table-cell>
          <table:table-cell table:style-name="表格6.E4" office:value-type="string">
            <text:p text:style-name="P14"><text:span text:style-name="T15">—</text:span></text:p>
          </table:table-cell>
        </table:table-row>
        <table:table-row table:style-name="表格6.1">
          <table:table-cell table:style-name="表格6.A5" office:value-type="string">
            <text:p text:style-name="P14"><text:span text:style-name="T14">最適圖型</text:span></text:p>
          </table:table-cell>
          <table:table-cell table:style-name="表格6.B5" office:value-type="string">
            <text:p text:style-name="P14"><text:span text:style-name="T15">稠密圖（邊很多）</text:span></text:p>
          </table:table-cell>
          <table:table-cell table:style-name="表格6.C5" office:value-type="string">
            <text:p text:style-name="P14"><text:span text:style-name="T15">稀疏圖（邊很少）</text:span></text:p>
          </table:table-cell>
          <table:table-cell table:style-name="表格6.D5" office:value-type="string">
            <text:p text:style-name="P14"><text:span text:style-name="T15">平行/分散式計算</text:span></text:p>
          </table:table-cell>
          <table:table-cell table:style-name="表格6.E5" office:value-type="string">
            <text:p text:style-name="P14"><text:span text:style-name="T15">—</text:span></text:p>
          </table:table-cell>
        </table:table-row>
        <table:table-row table:style-name="表格6.1">
          <table:table-cell table:style-name="表格6.A6" office:value-type="string">
            <text:p text:style-name="P14"><text:span text:style-name="T14">防止 Cycle 方式</text:span></text:p>
          </table:table-cell>
          <table:table-cell table:style-name="表格6.B6" office:value-type="string">
            <text:p text:style-name="P14"><text:span text:style-name="T15">樹內→樹外規則，天然防止</text:span></text:p>
          </table:table-cell>
          <table:table-cell table:style-name="表格6.C6" office:value-type="string">
            <text:p text:style-name="P14"><text:span text:style-name="T15">Union-Find 判斷</text:span></text:p>
          </table:table-cell>
          <table:table-cell table:style-name="表格6.D6" office:value-type="string">
            <text:p text:style-name="P14"><text:span text:style-name="T15">Component 合併後自動排除</text:span></text:p>
          </table:table-cell>
          <table:table-cell table:style-name="表格6.E6" office:value-type="string">
            <text:p text:style-name="P14"><text:span text:style-name="T15">—</text:span></text:p>
          </table:table-cell>
        </table:table-row>
      </table:table>
      <text:p text:style-name="P11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3"><text:span text:style-name="T7">🧠 一句話記憶口訣：</text:span></text:p>
            <text:p text:style-name="P13"><text:span text:style-name="T21">Prim</text:span><text:span text:style-name="T16"> 從「點」長出來 <text:s text:c="2"/></text:span><text:span text:style-name="T26">Kruskal</text:span><text:span text:style-name="T16"> 從「邊」挑起來 <text:s text:c="2"/></text:span><text:span text:style-name="T29">Sollin</text:span><text:span text:style-name="T16"> 大家同時搶</text:span></text:p>
            <text:p text:style-name="P17"/>
            <text:p text:style-name="P13"><text:span text:style-name="T24">圖很密（邊多）→ Prim <text:s/>| <text:s/>圖很稀（邊少）→ Kruskal <text:s/>| <text:s/>要平行化 → Sollin</text:span></text:p>
          </table:table-cell>
        </table:table-row>
      </table:table>
      <text:p text:style-name="P15"/>
      <text:h text:style-name="P3" text:outline-level="2"><text:span text:style-name="T19">2-1 什麼是稠密圖？什麼是稀疏圖？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8"><text:span text:style-name="T18"><text:s text:c="2"/>稠密圖（Dense Graph）： <text:s text:c="13"/>稀疏圖（Sparse Graph）：</text:span></text:p>
            <text:p text:style-name="P18"/>
            <text:p text:style-name="P18"><text:span text:style-name="T18"><text:s text:c="2"/>邊數 E 接近最大值 V(V-1)/2 <text:s text:c="10"/>邊數 E 遠小於 V(V-1)/2</text:span></text:p>
            <text:p text:style-name="P18"/>
            <text:p text:style-name="P18"><text:span text:style-name="T18"><text:s text:c="2"/>例：5個城市，幾乎每兩個都有路 <text:s text:c="7"/>例：100個城市，只有 110 條路</text:span></text:p>
            <text:p text:style-name="P18"/>
            <text:p text:style-name="P18"><text:span text:style-name="T18"><text:s text:c="4"/>A─B─C─D─E <text:s text:c="26"/>A <text:s text:c="9"/>B</text:span></text:p>
            <text:p text:style-name="P18"><text:span text:style-name="T18"><text:s text:c="4"/>│╲│╱│╲│╱│ <text:s text:c="25"/>│ <text:s text:c="9"/>│</text:span></text:p>
            <text:p text:style-name="P18"><text:span text:style-name="T18"><text:s text:c="4"/>└─┼─┼─┼─┘ <text:s text:c="2"/>邊非常多 <text:s text:c="13"/>C──D <text:s text:c="7"/>E</text:span></text:p>
            <text:p text:style-name="P18"><text:span text:style-name="T18"><text:s text:c="6"/>└─┴─┘ <text:s text:c="30"/>只有幾條連線</text:span></text:p>
            <text:p text:style-name="P18"/>
            <text:p text:style-name="P18"><text:span text:style-name="T18"><text:s text:c="2"/>100個節點最多 100×99/2 = 4950 條邊 <text:s text:c="2"/>100個節點可能只有 110 條邊</text:span></text:p>
            <text:p text:style-name="P18"/>
            <text:p text:style-name="P18"><text:soft-page-break/><text:span text:style-name="T18"><text:s text:c="2"/>→ 適合 Prim（不用排序） <text:s text:c="14"/>→ 適合 Kruskal（排序便宜）</text:span></text:p>
          </table:table-cell>
        </table:table-row>
      </table:table>
      <text:h text:style-name="P2" text:outline-level="1"><text:span text:style-name="T8">三、Prim 演算法 ── 從節點出發，像樹一樣往外長</text:span></text:h>
      <text:h text:style-name="P3" text:outline-level="2"><text:span text:style-name="T19">3-1 核心概念（超新手版解釋）</text:span></text:h>
      <text:p text:style-name="P13"><text:span text:style-name="T12">把 Prim 想像成「蓋電纜網路」的工程：先把一個城市接上電纜（T = 已連通的城市集合），然後每次往外找「接一個新城市費用最低的電纜」，一步步延伸，直到所有城市都有電纜為止。</text:span></text:p>
      <text:p text:style-name="P15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3"><text:span text:style-name="T7">Prim 執行步驟（只有4步！）：</text:span></text:p>
            <text:list text:style-name="WWNum2">
              <text:list-item text:start-value="1">
                <text:p text:style-name="P4"><text:span text:style-name="T12">從任意一個節點出發，加入「已選集合 T」。</text:span></text:p>
              </text:list-item>
              <text:list-item>
                <text:p text:style-name="P4"><text:span text:style-name="T12">列出所有「T 內 → T 外」的邊，這些叫「候選邊」。</text:span></text:p>
              </text:list-item>
              <text:list-item>
                <text:p text:style-name="P4"><text:span text:style-name="T12">從候選邊中挑出權重最小者，加入 MST，並把新節點加入 T。</text:span></text:p>
              </text:list-item>
              <text:list-item>
                <text:p text:style-name="P4"><text:span text:style-name="T12">重複步驟②③，直到 T 包含全部 V 個節點（選了 V-1 條邊）。</text:span></text:p>
              </text:list-item>
            </text:list>
            <text:p text:style-name="P16"/>
            <text:p text:style-name="P13"><text:span text:style-name="T27">關鍵：</text:span><text:span text:style-name="T12">候選邊的規則「一端在 T 內、另一端在 T 外」天然保證不成環！</text:span></text:p>
          </table:table-cell>
        </table:table-row>
      </table:table>
      <text:p text:style-name="P11"/>
      <text:h text:style-name="P3" text:outline-level="2"><text:span text:style-name="T19">3-2 完整圖解範例（4個節點 A, B, C, D）</text:span></text:h>
      <text:p text:style-name="P13"><text:span text:style-name="T12">範例圖：AB=1, AC=4, BC=2, BD=5, CD=3</text:span></text:p>
      <text:p text:style-name="P19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8"><text:span text:style-name="T18"><text:s text:c="2"/>初始圖（從 A 出發）：</text:span></text:p>
            <text:p text:style-name="P18"/>
            <text:p text:style-name="P18"><text:span text:style-name="T18"><text:s text:c="9"/>A</text:span></text:p>
            <text:p text:style-name="P18"><text:span text:style-name="T18"><text:s text:c="8"/>/ \</text:span></text:p>
            <text:p text:style-name="P18"><text:span text:style-name="T18"><text:s text:c="7"/>1 <text:s text:c="2"/>4 <text:s text:c="13"/>4個節點：A, B, C, D</text:span></text:p>
            <text:p text:style-name="P18"><text:span text:style-name="T18"><text:s text:c="6"/>/ <text:s text:c="4"/>\ <text:s text:c="12"/>5條邊：AB=1, AC=4, BC=2, BD=5, CD=3</text:span></text:p>
            <text:p text:style-name="P18"><text:span text:style-name="T18"><text:s text:c="5"/>B --2-- C <text:s text:c="11"/>目標：MST 需要 V-1 = 3 條邊</text:span></text:p>
            <text:p text:style-name="P18"><text:span text:style-name="T18"><text:s text:c="6"/>\ <text:s text:c="4"/>/</text:span></text:p>
            <text:p text:style-name="P18"><text:span text:style-name="T18"><text:s text:c="7"/>5 <text:s text:c="2"/>3</text:span></text:p>
            <text:p text:style-name="P18"><text:span text:style-name="T18"><text:s text:c="8"/>\ /</text:span></text:p>
            <text:p text:style-name="P18"><text:span text:style-name="T18"><text:s text:c="9"/>D</text:span></text:p>
          </table:table-cell>
        </table:table-row>
      </table:table>
      <text:p text:style-name="P15"/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table:number-columns-spanned="2" office:value-type="string">
            <text:p text:style-name="P13"><text:span text:style-name="T3">Step 1：從 A 開始，T = {A}</text:span></text:p>
          </table:table-cell>
          <table:covered-table-cell/>
        </table:table-row>
        <table:table-row table:style-name="表格11.1">
          <table:table-cell table:style-name="表格11.A2" office:value-type="string">
            <text:p text:style-name="P8"><text:span text:style-name="T22">Step 1</text:span></text:p>
          </table:table-cell>
          <table:table-cell table:style-name="表格11.B2" office:value-type="string">
            <text:p text:style-name="P20"><text:span text:style-name="T18">T（已連通集合）= {A}</text:span></text:p>
            <text:p text:style-name="P20"/>
            <text:p text:style-name="P20"><text:span text:style-name="T18">候選邊（A 往外連的邊）：</text:span></text:p>
            <text:p text:style-name="P20"><text:span text:style-name="T18"><text:s text:c="2"/>A─B = 1 <text:s text:c="2"/>← 最小！選它！</text:span></text:p>
            <text:p text:style-name="P20"><text:span text:style-name="T18"><text:s text:c="2"/>A─C = 4</text:span></text:p>
            <text:p text:style-name="P20"/>
            <text:p text:style-name="P20"><text:span text:style-name="T18">動作：加入邊 A─B=1，節點 B 加入 T</text:span></text:p>
            <text:p text:style-name="P20"/>
            <text:p text:style-name="P20"><text:span text:style-name="T18">目前 MST 的樣子：</text:span></text:p>
            <text:p text:style-name="P20"><text:span text:style-name="T18"><text:s text:c="2"/>A</text:span></text:p>
            <text:p text:style-name="P20"><text:span text:style-name="T18"><text:s text:c="2"/>│</text:span></text:p>
            <text:p text:style-name="P20"><text:span text:style-name="T18"><text:s text:c="2"/>1 <text:s/>← 新選的邊</text:span></text:p>
            <text:p text:style-name="P20"><text:span text:style-name="T18"><text:s text:c="2"/>│</text:span></text:p>
            <text:p text:style-name="P20"><text:span text:style-name="T18"><text:s text:c="2"/>B</text:span></text:p>
          </table:table-cell>
        </table:table-row>
      </table:table>
      <text:p text:style-name="P16"><text:soft-page-break/></text:p>
      <table:table table:name="表格12" table:style-name="表格12">
        <table:table-column table:style-name="表格12.A"/>
        <table:table-column table:style-name="表格12.B"/>
        <table:table-row table:style-name="表格12.1">
          <table:table-cell table:style-name="表格12.A1" table:number-columns-spanned="2" office:value-type="string">
            <text:p text:style-name="P13"><text:span text:style-name="T3">Step 2：T = {A, B}，繼續往外長</text:span></text:p>
          </table:table-cell>
          <table:covered-table-cell/>
        </table:table-row>
        <table:table-row table:style-name="表格12.1">
          <table:table-cell table:style-name="表格12.A2" office:value-type="string">
            <text:p text:style-name="P8"><text:span text:style-name="T22">Step 2</text:span></text:p>
          </table:table-cell>
          <table:table-cell table:style-name="表格12.B2" office:value-type="string">
            <text:p text:style-name="P20"><text:span text:style-name="T18">T（已連通集合）= {A, B}</text:span></text:p>
            <text:p text:style-name="P20"/>
            <text:p text:style-name="P20"><text:span text:style-name="T18">候選邊（T 往外連的邊）：</text:span></text:p>
            <text:p text:style-name="P20"><text:span text:style-name="T18"><text:s text:c="2"/>A─C = 4 <text:s/>（A在T，C在T外）</text:span></text:p>
            <text:p text:style-name="P20"><text:span text:style-name="T18"><text:s text:c="2"/>B─C = 2 <text:s/>（B在T，C在T外）← 最小！</text:span></text:p>
            <text:p text:style-name="P20"><text:span text:style-name="T18"><text:s text:c="2"/>B─D = 5 <text:s/>（B在T，D在T外）</text:span></text:p>
            <text:p text:style-name="P20"/>
            <text:p text:style-name="P20"><text:span text:style-name="T18"><text:s text:c="2"/>❌ A─B 兩端都在 T，不是候選邊</text:span></text:p>
            <text:p text:style-name="P20"/>
            <text:p text:style-name="P20"><text:span text:style-name="T18">動作：加入邊 B─C=2，節點 C 加入 T</text:span></text:p>
            <text:p text:style-name="P20"/>
            <text:p text:style-name="P20"><text:span text:style-name="T18">目前 MST 的樣子：</text:span></text:p>
            <text:p text:style-name="P20"><text:span text:style-name="T18"><text:s text:c="2"/>A</text:span></text:p>
            <text:p text:style-name="P20"><text:span text:style-name="T18"><text:s text:c="2"/>│</text:span></text:p>
            <text:p text:style-name="P20"><text:span text:style-name="T18"><text:s text:c="2"/>1</text:span></text:p>
            <text:p text:style-name="P20"><text:span text:style-name="T18"><text:s text:c="2"/>│</text:span></text:p>
            <text:p text:style-name="P20"><text:span text:style-name="T18"><text:s text:c="2"/>B──2──C</text:span></text:p>
          </table:table-cell>
        </table:table-row>
      </table:table>
      <text:p text:style-name="P16"/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table:number-columns-spanned="2" office:value-type="string">
            <text:p text:style-name="P13"><text:span text:style-name="T3">Step 3：T = {A, B, C}，繼續往外長</text:span></text:p>
          </table:table-cell>
          <table:covered-table-cell/>
        </table:table-row>
        <table:table-row table:style-name="表格13.1">
          <table:table-cell table:style-name="表格13.A2" office:value-type="string">
            <text:p text:style-name="P8"><text:span text:style-name="T22">Step 3</text:span></text:p>
          </table:table-cell>
          <table:table-cell table:style-name="表格13.B2" office:value-type="string">
            <text:p text:style-name="P20"><text:span text:style-name="T18">T（已連通集合）= {A, B, C}</text:span></text:p>
            <text:p text:style-name="P20"/>
            <text:p text:style-name="P20"><text:span text:style-name="T18">候選邊（T 往外連的邊）：</text:span></text:p>
            <text:p text:style-name="P20"><text:span text:style-name="T18"><text:s text:c="2"/>A─C = 4 <text:s/>兩端都在T！不是候選邊</text:span></text:p>
            <text:p text:style-name="P20"><text:span text:style-name="T18"><text:s text:c="2"/>B─C = 2 <text:s/>兩端都在T！不是候選邊</text:span></text:p>
            <text:p text:style-name="P20"><text:span text:style-name="T18"><text:s text:c="2"/>B─D = 5 <text:s/>（B在T，D在T外）</text:span></text:p>
            <text:p text:style-name="P20"><text:span text:style-name="T18"><text:s text:c="2"/>C─D = 3 <text:s/>（C在T，D在T外）← 最小！</text:span></text:p>
            <text:p text:style-name="P20"/>
            <text:p text:style-name="P20"><text:span text:style-name="T18">動作：加入邊 C─D=3，節點 D 加入 T</text:span></text:p>
            <text:p text:style-name="P20"/>
            <text:p text:style-name="P20"><text:span text:style-name="T18">目前 MST 的樣子：</text:span></text:p>
            <text:p text:style-name="P20"><text:span text:style-name="T18"><text:s text:c="2"/>A</text:span></text:p>
            <text:p text:style-name="P20"><text:span text:style-name="T18"><text:s text:c="2"/>│</text:span></text:p>
            <text:p text:style-name="P20"><text:span text:style-name="T18"><text:s text:c="2"/>1</text:span></text:p>
            <text:p text:style-name="P20"><text:span text:style-name="T18"><text:s text:c="2"/>│</text:span></text:p>
            <text:p text:style-name="P20"><text:span text:style-name="T18"><text:s text:c="2"/>B──2──C</text:span></text:p>
            <text:p text:style-name="P20"><text:span text:style-name="T18"><text:s text:c="9"/>│</text:span></text:p>
            <text:p text:style-name="P20"><text:span text:style-name="T18"><text:s text:c="9"/>3 <text:s/>← 新選的邊</text:span></text:p>
            <text:p text:style-name="P20"><text:span text:style-name="T18"><text:s text:c="9"/>│</text:span></text:p>
            <text:p text:style-name="P20"><text:span text:style-name="T18"><text:s text:c="9"/>D</text:span></text:p>
          </table:table-cell>
        </table:table-row>
      </table:table>
      <text:p text:style-name="P19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3"><text:span text:style-name="T31">✅ 完成！T = {A, B, C, D}，所有節點已連通</text:span></text:p>
            <text:p text:style-name="P17"/>
            <text:p text:style-name="P13"><text:span text:style-name="T13">MST 邊集合：</text:span><text:span text:style-name="T12">A─B=1, B─C=2, C─D=3</text:span></text:p>
            <text:p text:style-name="P13"><text:span text:style-name="T13">總權重：</text:span><text:span text:style-name="T12">1 + 2 + 3 = 6</text:span></text:p>
            <text:p text:style-name="P13"><text:span text:style-name="T13">邊數驗證：</text:span><text:span text:style-name="T12">V-1 = 4-1 = 3 條 <text:s/>✅</text:span></text:p>
          </table:table-cell>
        </table:table-row>
      </table:table>
      <text:p text:style-name="P11"><text:soft-page-break/></text:p>
      <text:h text:style-name="P3" text:outline-level="2"><text:span text:style-name="T19">3-3 為什麼 Prim 天然不產生 Cycle？</text:span>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8"><text:span text:style-name="T18"><text:s text:c="2"/>【規則】：候選邊必須「一端在T、一端不在T」</text:span></text:p>
            <text:p text:style-name="P18"/>
            <text:p text:style-name="P18"><text:span text:style-name="T18"><text:s text:c="2"/>T = {A, B, C}：</text:span></text:p>
            <text:p text:style-name="P18"/>
            <text:p text:style-name="P18"><text:span text:style-name="T18"><text:s text:c="2"/>✅ 合法候選邊： <text:s text:c="15"/>❌ 自動排除（兩端都在T）：</text:span></text:p>
            <text:p text:style-name="P18"><text:span text:style-name="T18"><text:s text:c="5"/>C → D <text:s/>一端在T外，OK <text:s text:c="10"/>A ─ B <text:s/>兩端都在T，若加 → 成環！</text:span></text:p>
            <text:p text:style-name="P18"><text:span text:style-name="T18"><text:s text:c="5"/>B → D <text:s/>一端在T外，OK <text:s text:c="10"/>B ─ C <text:s/>兩端都在T，若加 → 成環！</text:span></text:p>
            <text:p text:style-name="P18"/>
            <text:p text:style-name="P18"><text:span text:style-name="T18"><text:s text:c="2"/>結論：Prim 靠「T內→T外」規則，完全不需要 Union-Find，</text:span></text:p>
            <text:p text:style-name="P18"><text:span text:style-name="T18"><text:s text:c="8"/>也不用額外檢查環，天然保證 MST 合法！</text:span></text:p>
          </table:table-cell>
        </table:table-row>
      </table:table>
      <text:p text:style-name="P11"/>
      <text:h text:style-name="P3" text:outline-level="2"><text:span text:style-name="T19">3-4 Prim 程式實作（Python）</text:span></text:h>
      <text:p text:style-name="P13"><text:span text:style-name="T12">以下是 Prim 演算法的 Python 實作，使用 Min-Heap（最小堆積）讓效率更好：</text:span></text:p>
      <text:p text:style-name="P19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1"><text:span text:style-name="T35">import heapq <text:s text:c="3"/># Python 內建的最小堆積（Min-Heap）模組</text:span></text:p>
            <text:p text:style-name="P21"/>
            <text:p text:style-name="P21"><text:span text:style-name="T35">def prim(graph, start=0):</text:span></text:p>
            <text:p text:style-name="P21"><text:span text:style-name="T35"><text:s text:c="4"/>"""</text:span></text:p>
            <text:p text:style-name="P21"><text:span text:style-name="T35"><text:s text:c="4"/>graph：鄰接表。graph[u] = [(邊的權重, 對方節點), ...]</text:span></text:p>
            <text:p text:style-name="P21"><text:span text:style-name="T35"><text:s text:c="4"/>start：從哪個節點開始（預設節點 0）</text:span></text:p>
            <text:p text:style-name="P21"><text:span text:style-name="T35"><text:s text:c="4"/>回傳：MST 邊清單 [(權重, 起點, 終點), ...] 和總權重</text:span></text:p>
            <text:p text:style-name="P21"><text:span text:style-name="T35"><text:s text:c="4"/>"""</text:span></text:p>
            <text:p text:style-name="P21"><text:span text:style-name="T35"><text:s text:c="4"/>n = len(graph) <text:s text:c="5"/># 節點數量</text:span></text:p>
            <text:p text:style-name="P21"><text:span text:style-name="T35"><text:s text:c="4"/>in_tree = set() <text:s text:c="4"/># 記錄哪些節點已進入 T（已連通集合）</text:span></text:p>
            <text:p text:style-name="P21"><text:span text:style-name="T35"><text:s text:c="4"/>mst_edges = [] <text:s text:c="5"/># 記錄 MST 選了哪些邊</text:span></text:p>
            <text:p text:style-name="P21"><text:span text:style-name="T35"><text:s text:c="4"/>total = 0 <text:s text:c="10"/># MST 總權重</text:span></text:p>
            <text:p text:style-name="P21"/>
            <text:p text:style-name="P21"><text:span text:style-name="T35"><text:s text:c="4"/># Min-Heap 格式：（權重, 目標節點, 來自節點）</text:span></text:p>
            <text:p text:style-name="P21"><text:span text:style-name="T35"><text:s text:c="4"/>heap = [(0, start, -1)] <text:s text:c="2"/># 起點虛擬邊（權重0，無來源）</text:span></text:p>
            <text:p text:style-name="P21"/>
            <text:p text:style-name="P21"><text:span text:style-name="T35"><text:s text:c="4"/>while heap and len(in_tree) &lt; n:</text:span></text:p>
            <text:p text:style-name="P21"><text:span text:style-name="T35"><text:s text:c="8"/>w, u, prev = heapq.heappop(heap) <text:s text:c="2"/># 取出最小權重邊</text:span></text:p>
            <text:p text:style-name="P21"/>
            <text:p text:style-name="P21"><text:span text:style-name="T35"><text:s text:c="8"/>if u in in_tree: <text:s text:c="4"/># 如果 u 已在 T 裡，跳過</text:span></text:p>
            <text:p text:style-name="P21"><text:span text:style-name="T35"><text:s text:c="12"/>continue</text:span></text:p>
            <text:p text:style-name="P21"/>
            <text:p text:style-name="P21"><text:span text:style-name="T35"><text:s text:c="8"/>in_tree.add(u) <text:s text:c="6"/># 把 u 加入 T</text:span></text:p>
            <text:p text:style-name="P21"/>
            <text:p text:style-name="P21"><text:span text:style-name="T35"><text:s text:c="8"/>if prev != -1: <text:s text:c="6"/># 記錄真實邊（起點那條虛擬邊不算）</text:span></text:p>
            <text:p text:style-name="P21"><text:span text:style-name="T35"><text:s text:c="12"/>mst_edges.append((w, prev, u))</text:span></text:p>
            <text:p text:style-name="P21"><text:span text:style-name="T35"><text:s text:c="12"/>total += w</text:span></text:p>
            <text:p text:style-name="P21"/>
            <text:p text:style-name="P21"><text:span text:style-name="T35"><text:s text:c="8"/># 把 u 的所有鄰邊推入 heap（只推「到T外節點」的邊）</text:span></text:p>
            <text:p text:style-name="P21"><text:span text:style-name="T35"><text:s text:c="8"/>for edge_w, v in graph[u]:</text:span></text:p>
            <text:p text:style-name="P21"><text:span text:style-name="T35"><text:s text:c="12"/>if v not in in_tree:</text:span></text:p>
            <text:p text:style-name="P21"><text:span text:style-name="T35"><text:s text:c="16"/>heapq.heappush(heap, (edge_w, v, u))</text:span></text:p>
            <text:p text:style-name="P21"/>
            <text:p text:style-name="P21"><text:span text:style-name="T35"><text:s text:c="4"/>return mst_edges, total</text:span></text:p>
            <text:p text:style-name="P21"/>
            <text:p text:style-name="P21"><text:span text:style-name="T35"># ─── 範例測試：A=0, B=1, C=2, D=3 ─────────────────</text:span></text:p>
            <text:p text:style-name="P21"><text:soft-page-break/><text:span text:style-name="T35"># 邊：AB=1, AC=4, BC=2, BD=5, CD=3</text:span></text:p>
            <text:p text:style-name="P21"><text:span text:style-name="T35">graph = {</text:span></text:p>
            <text:p text:style-name="P21"><text:span text:style-name="T35"><text:s text:c="4"/>0: [(1,1),(4,2)], <text:s text:c="9"/># A：到B(距離1), 到C(距離4)</text:span></text:p>
            <text:p text:style-name="P21"><text:span text:style-name="T35"><text:s text:c="4"/>1: [(1,0),(2,2),(5,3)], <text:s text:c="3"/># B：到A(1), 到C(2), 到D(5)</text:span></text:p>
            <text:p text:style-name="P21"><text:span text:style-name="T35"><text:s text:c="4"/>2: [(4,0),(2,1),(3,3)], <text:s text:c="3"/># C：到A(4), 到B(2), 到D(3)</text:span></text:p>
            <text:p text:style-name="P21"><text:span text:style-name="T35"><text:s text:c="4"/>3: [(5,1),(3,2)], <text:s text:c="9"/># D：到B(5), 到C(3)</text:span></text:p>
            <text:p text:style-name="P21"><text:span text:style-name="T35">}</text:span></text:p>
            <text:p text:style-name="P21"><text:span text:style-name="T35">edges, total = prim(graph, start=0)</text:span></text:p>
            <text:p text:style-name="P21"><text:span text:style-name="T35">print('MST 邊：', edges) <text:s text:c="3"/># 輸出：[(1,0,1), (2,1,2), (3,2,3)]</text:span></text:p>
            <text:p text:style-name="P21"><text:span text:style-name="T35">print('總權重：', total) <text:s text:c="3"/># 輸出：6</text:span></text:p>
          </table:table-cell>
        </table:table-row>
      </table:table>
      <text:p text:style-name="P11"/>
      <text:h text:style-name="P3" text:outline-level="2"><text:span text:style-name="T19">3-5 Prim 時間複雜度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row table:style-name="表格17.1">
          <table:table-cell table:style-name="表格17.A1" office:value-type="string">
            <text:p text:style-name="P8"><text:span text:style-name="T2">版本</text:span></text:p>
          </table:table-cell>
          <table:table-cell table:style-name="表格17.A1" office:value-type="string">
            <text:p text:style-name="P8"><text:span text:style-name="T2">資料結構</text:span></text:p>
          </table:table-cell>
          <table:table-cell table:style-name="表格17.A1" office:value-type="string">
            <text:p text:style-name="P8"><text:span text:style-name="T2">時間複雜度</text:span></text:p>
          </table:table-cell>
          <table:table-cell table:style-name="表格17.A1" office:value-type="string">
            <text:p text:style-name="P8"><text:span text:style-name="T2">什麼時候用？</text:span></text:p>
          </table:table-cell>
        </table:table-row>
        <table:table-row table:style-name="表格17.1">
          <table:table-cell table:style-name="表格17.A2" office:value-type="string">
            <text:p text:style-name="P14"><text:span text:style-name="T14">基本版</text:span></text:p>
          </table:table-cell>
          <table:table-cell table:style-name="表格17.B2" office:value-type="string">
            <text:p text:style-name="P14"><text:span text:style-name="T15">鄰接矩陣</text:span></text:p>
          </table:table-cell>
          <table:table-cell table:style-name="表格17.C2" office:value-type="string">
            <text:p text:style-name="P14"><text:span text:style-name="T15">O(V²)</text:span></text:p>
          </table:table-cell>
          <table:table-cell table:style-name="表格17.D2" office:value-type="string">
            <text:p text:style-name="P14"><text:span text:style-name="T15">稠密圖（邊數接近 V²）時，這個反而最省</text:span></text:p>
          </table:table-cell>
        </table:table-row>
        <table:table-row table:style-name="表格17.1">
          <table:table-cell table:style-name="表格17.A3" office:value-type="string">
            <text:p text:style-name="P14"><text:span text:style-name="T14">最佳化版</text:span></text:p>
          </table:table-cell>
          <table:table-cell table:style-name="表格17.B3" office:value-type="string">
            <text:p text:style-name="P14"><text:span text:style-name="T15">Min-Heap（優先佇列）</text:span></text:p>
          </table:table-cell>
          <table:table-cell table:style-name="表格17.C3" office:value-type="string">
            <text:p text:style-name="P14"><text:span text:style-name="T15">O(E log V)</text:span></text:p>
          </table:table-cell>
          <table:table-cell table:style-name="表格17.D3" office:value-type="string">
            <text:p text:style-name="P14"><text:span text:style-name="T15">一般圖，E 不太大時使用</text:span></text:p>
          </table:table-cell>
        </table:table-row>
      </table:table>
      <text:h text:style-name="P2" text:outline-level="1"><text:span text:style-name="T8">四、Kruskal 演算法 ── 從邊開始，最小邊優先</text:span></text:h>
      <text:h text:style-name="P3" text:outline-level="2"><text:span text:style-name="T19">4-1 核心概念（超新手版解釋）</text:span></text:h>
      <text:p text:style-name="P13"><text:span text:style-name="T12">把 Kruskal 想像成「買電纜」：先把所有可用的電纜按費用從低到高排好，然後從最便宜的開始買，買一條就把它連上。唯一的限制是：「這條電纜連上後不能造成迴路（因為迴路代表多花了不必要的錢）」。</text:span></text:p>
      <text:p text:style-name="P15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3"><text:span text:style-name="T26">Kruskal 執行步驟（只有5步！）：</text:span></text:p>
            <text:list text:continue-numbering="true" text:style-name="WWNum2">
              <text:list-item>
                <text:p text:style-name="P4"><text:span text:style-name="T12">列出圖中所有邊，按「權重由小到大」排序。</text:span></text:p>
              </text:list-item>
              <text:list-item>
                <text:p text:style-name="P4"><text:span text:style-name="T12">準備 Union-Find（下面會詳細解釋），一開始每個節點自成一組。</text:span></text:p>
              </text:list-item>
              <text:list-item>
                <text:p text:style-name="P4"><text:span text:style-name="T12">從最小邊 (u, v) 開始處理：查問 Find(u) 和 Find(v)。</text:span></text:p>
              </text:list-item>
              <text:list-item>
                <text:p text:style-name="P4"><text:span text:style-name="T12">如果 Find(u) ≠ Find(v)（兩個節點不同組）→ 加入 MST，合併兩組。</text:span></text:p>
              </text:list-item>
              <text:list-item>
                <text:p text:style-name="P4"><text:span text:style-name="T12">如果 Find(u) = Find(v)（兩個節點同組）→ 加了會成環，跳過！</text:span></text:p>
              </text:list-item>
            </text:list>
            <text:p text:style-name="P17"/>
            <text:p text:style-name="P13"><text:span text:style-name="T27">不斷重複直到選出 V-1 條邊，MST 完成。</text:span></text:p>
          </table:table-cell>
        </table:table-row>
      </table:table>
      <text:p text:style-name="P11"/>
      <text:h text:style-name="P3" text:outline-level="2"><text:span text:style-name="T19">4-2 Union-Find（並查集）詳細解說</text:span></text:h>
      <text:p text:style-name="P13"><text:span text:style-name="T12">Union-Find 是一種追蹤「哪些節點已經屬於同一個連通組」的工具。每個節點都有一個「代表人（root）」，同組的節點共用同一個代表人。</text:span></text:p>
      <text:p text:style-name="P15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8"><text:span text:style-name="T18"><text:s text:c="2"/>【Find 操作】：找到某個節點的代表人</text:span></text:p>
            <text:p text:style-name="P18"/>
            <text:p text:style-name="P18"><text:span text:style-name="T18"><text:s text:c="2"/>初始狀態：每個節點自己代表自己</text:span></text:p>
            <text:p text:style-name="P18"><text:span text:style-name="T18"><text:s text:c="2"/>節點： <text:s/>A <text:s text:c="3"/>B <text:s text:c="3"/>C <text:s text:c="3"/>D <text:s text:c="3"/>E</text:span></text:p>
            <text:p text:style-name="P18"><text:span text:style-name="T18"><text:s text:c="2"/>代表： <text:s/>A <text:s text:c="3"/>B <text:s text:c="3"/>C <text:s text:c="3"/>D <text:s text:c="3"/>E <text:s text:c="2"/>（每人自己是代表）</text:span></text:p>
            <text:p text:style-name="P18"><text:span text:style-name="T18"><text:s text:c="2"/>集合：{A} <text:s/>{B} <text:s/>{C} <text:s/>{D} <text:s/>{E}</text:span></text:p>
            <text:p text:style-name="P18"/>
            <text:p text:style-name="P18"><text:soft-page-break/><text:span text:style-name="T18"><text:s text:c="2"/>─────────────────────────────────────────────────────────</text:span></text:p>
            <text:p text:style-name="P18"><text:span text:style-name="T18"><text:s text:c="2"/>【Union 操作】：合併兩個節點所在的組</text:span></text:p>
            <text:p text:style-name="P18"/>
            <text:p text:style-name="P18"><text:span text:style-name="T18"><text:s text:c="2"/>Union(A, B)：把 A 的組和 B 的組合併</text:span></text:p>
            <text:p text:style-name="P18"><text:span text:style-name="T18"><text:s text:c="2"/>→ B 的代表改成 A</text:span></text:p>
            <text:p text:style-name="P18"><text:span text:style-name="T18"><text:s text:c="2"/>節點： <text:s/>A <text:s text:c="3"/>B <text:s text:c="3"/>C <text:s text:c="3"/>D <text:s text:c="3"/>E</text:span></text:p>
            <text:p text:style-name="P18"><text:span text:style-name="T18"><text:s text:c="2"/>代表： <text:s/>A <text:s text:c="3"/>A <text:s text:c="3"/>C <text:s text:c="3"/>D <text:s text:c="3"/>E <text:s text:c="2"/>← B 的代表變成 A</text:span></text:p>
            <text:p text:style-name="P18"><text:span text:style-name="T18"><text:s text:c="2"/>集合：{A,B} <text:s/>{C} <text:s/>{D} <text:s/>{E}</text:span></text:p>
            <text:p text:style-name="P18"/>
            <text:p text:style-name="P18"><text:span text:style-name="T18"><text:s text:c="2"/>Union(C, D)：</text:span></text:p>
            <text:p text:style-name="P18"><text:span text:style-name="T18"><text:s text:c="2"/>集合：{A,B} <text:s/>{C,D} <text:s/>{E}</text:span></text:p>
            <text:p text:style-name="P18"/>
            <text:p text:style-name="P18"><text:span text:style-name="T18"><text:s text:c="2"/>Union(B, C)：Find(B)=A，Find(C)=C，不同 → 合併</text:span></text:p>
            <text:p text:style-name="P18"><text:span text:style-name="T18"><text:s text:c="2"/>集合：{A,B,C,D} <text:s/>{E}</text:span></text:p>
            <text:p text:style-name="P18"/>
            <text:p text:style-name="P18"><text:span text:style-name="T18"><text:s text:c="2"/>問：Union(A, D)？</text:span></text:p>
            <text:p text:style-name="P18"><text:span text:style-name="T18"><text:s text:c="2"/>Find(A)=A，Find(D)=A → 相同！→ 跳過，加了會成環！</text:span></text:p>
            <text:p text:style-name="P18"/>
            <text:p text:style-name="P18"><text:span text:style-name="T18"><text:s text:c="2"/>─────────────────────────────────────────────────────────</text:span></text:p>
            <text:p text:style-name="P18"><text:span text:style-name="T18"><text:s text:c="2"/>核心口訣：同集合 → 跳過（會成環） <text:s/>不同集合 → 合併（加入 MST）</text:span></text:p>
          </table:table-cell>
        </table:table-row>
      </table:table>
      <text:p text:style-name="P11"/>
      <text:h text:style-name="P3" text:outline-level="2"><text:span text:style-name="T19">4-3 完整圖解範例（5個節點）</text:span></text:h>
      <text:p text:style-name="P13"><text:span text:style-name="T12">範例圖：AB=1, AC=4, BC=2, BD=5, CD=3, DE=6, CE=8</text:span></text:p>
      <text:p text:style-name="P19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8"><text:span text:style-name="T18"><text:s text:c="2"/>原始圖：</text:span></text:p>
            <text:p text:style-name="P18"><text:span text:style-name="T18"><text:s text:c="16"/>A</text:span></text:p>
            <text:p text:style-name="P18"><text:span text:style-name="T18"><text:s text:c="15"/>/ \</text:span></text:p>
            <text:p text:style-name="P18"><text:span text:style-name="T18"><text:s text:c="14"/>1 <text:s text:c="2"/>4</text:span></text:p>
            <text:p text:style-name="P18"><text:span text:style-name="T18"><text:s text:c="13"/>/ <text:s text:c="4"/>\</text:span></text:p>
            <text:p text:style-name="P18"><text:span text:style-name="T18"><text:s text:c="12"/>B --2-- C --8-- E</text:span></text:p>
            <text:p text:style-name="P18"><text:span text:style-name="T18"><text:s text:c="13"/>\ <text:s text:c="4"/>/</text:span></text:p>
            <text:p text:style-name="P18"><text:span text:style-name="T18"><text:s text:c="14"/>5 <text:s text:c="2"/>3</text:span></text:p>
            <text:p text:style-name="P18"><text:span text:style-name="T18"><text:s text:c="15"/>\ /</text:span></text:p>
            <text:p text:style-name="P18"><text:span text:style-name="T18"><text:s text:c="16"/>D --6-- E</text:span></text:p>
            <text:p text:style-name="P18"/>
            <text:p text:style-name="P18"><text:span text:style-name="T18"><text:s text:c="2"/>所有邊排序（由小到大）：AB=1, BC=2, CD=3, AC=4, BD=5, DE=6, CE=8</text:span></text:p>
          </table:table-cell>
        </table:table-row>
      </table:table>
      <text:p text:style-name="P15"/>
      <table:table table:name="表格21" table:style-name="表格21">
        <table:table-column table:style-name="表格21.A"/>
        <table:table-column table:style-name="表格21.B"/>
        <table:table-row table:style-name="表格21.1">
          <table:table-cell table:style-name="表格21.A1" table:number-columns-spanned="2" office:value-type="string">
            <text:p text:style-name="P13"><text:span text:style-name="T3">Step 1：選最小邊 AB=1</text:span></text:p>
          </table:table-cell>
          <table:covered-table-cell/>
        </table:table-row>
        <table:table-row table:style-name="表格21.1">
          <table:table-cell table:style-name="表格21.A2" office:value-type="string">
            <text:p text:style-name="P8"><text:span text:style-name="T28">Step 1</text:span></text:p>
          </table:table-cell>
          <table:table-cell table:style-name="表格21.B2" office:value-type="string">
            <text:p text:style-name="P20"><text:span text:style-name="T18">Find(A)=A <text:s text:c="3"/>Find(B)=B <text:s text:c="3"/>← 不同集合！可以加入</text:span></text:p>
            <text:p text:style-name="P20"><text:span text:style-name="T18">Union(A, B) → 合併成 {A,B}</text:span></text:p>
            <text:p text:style-name="P20"/>
            <text:p text:style-name="P20"><text:span text:style-name="T18">集合狀態：{A,B} <text:s/>{C} <text:s/>{D} <text:s/>{E}</text:span></text:p>
            <text:p text:style-name="P20"><text:span text:style-name="T18">已選邊：AB=1 <text:s/>（共 1 條）</text:span></text:p>
            <text:p text:style-name="P20"/>
            <text:p text:style-name="P20"><text:span text:style-name="T18"><text:s text:c="2"/>圖的連線狀態：A──1──B <text:s text:c="7"/>C <text:s text:c="10"/>D <text:s text:c="10"/>E</text:span></text:p>
          </table:table-cell>
        </table:table-row>
      </table:table>
      <text:p text:style-name="P22"/>
      <table:table table:name="表格22" table:style-name="表格22">
        <table:table-column table:style-name="表格22.A"/>
        <table:table-column table:style-name="表格22.B"/>
        <table:table-row table:style-name="表格22.1">
          <table:table-cell table:style-name="表格22.A1" table:number-columns-spanned="2" office:value-type="string">
            <text:p text:style-name="P13"><text:span text:style-name="T3">Step 2：選次小邊 BC=2</text:span></text:p>
          </table:table-cell>
          <table:covered-table-cell/>
        </table:table-row>
        <table:table-row table:style-name="表格22.1">
          <table:table-cell table:style-name="表格22.A2" office:value-type="string">
            <text:p text:style-name="P8"><text:span text:style-name="T28">Step 2</text:span></text:p>
          </table:table-cell>
          <table:table-cell table:style-name="表格22.B2" office:value-type="string">
            <text:p text:style-name="P20"><text:span text:style-name="T18">Find(B)=A <text:s text:c="3"/>Find(C)=C <text:s text:c="3"/>← 不同集合！可以加入</text:span></text:p>
            <text:p text:style-name="P20"><text:soft-page-break/><text:span text:style-name="T18">Union(B, C) → 即 Union(A, C) → {A,B,C}</text:span></text:p>
            <text:p text:style-name="P20"/>
            <text:p text:style-name="P20"><text:span text:style-name="T18">集合狀態：{A,B,C} <text:s/>{D} <text:s/>{E}</text:span></text:p>
            <text:p text:style-name="P20"><text:span text:style-name="T18">已選邊：AB=1, BC=2 <text:s/>（共 2 條）</text:span></text:p>
            <text:p text:style-name="P20"/>
            <text:p text:style-name="P20"><text:span text:style-name="T18"><text:s text:c="2"/>圖的連線狀態：A──1──B──2──C <text:s text:c="7"/>D <text:s text:c="10"/>E</text:span></text:p>
          </table:table-cell>
        </table:table-row>
      </table:table>
      <text:p text:style-name="P22"/>
      <table:table table:name="表格23" table:style-name="表格23">
        <table:table-column table:style-name="表格23.A"/>
        <table:table-column table:style-name="表格23.B"/>
        <table:table-row table:style-name="表格23.1">
          <table:table-cell table:style-name="表格23.A1" table:number-columns-spanned="2" office:value-type="string">
            <text:p text:style-name="P13"><text:span text:style-name="T3">Step 3：選次小邊 CD=3</text:span></text:p>
          </table:table-cell>
          <table:covered-table-cell/>
        </table:table-row>
        <table:table-row table:style-name="表格23.1">
          <table:table-cell table:style-name="表格23.A2" office:value-type="string">
            <text:p text:style-name="P8"><text:span text:style-name="T28">Step 3</text:span></text:p>
          </table:table-cell>
          <table:table-cell table:style-name="表格23.B2" office:value-type="string">
            <text:p text:style-name="P20"><text:span text:style-name="T18">Find(C)=A <text:s text:c="3"/>Find(D)=D <text:s text:c="3"/>← 不同集合！可以加入</text:span></text:p>
            <text:p text:style-name="P20"><text:span text:style-name="T18">Union(C, D) → 即 Union(A, D) → {A,B,C,D}</text:span></text:p>
            <text:p text:style-name="P20"/>
            <text:p text:style-name="P20"><text:span text:style-name="T18">集合狀態：{A,B,C,D} <text:s/>{E}</text:span></text:p>
            <text:p text:style-name="P20"><text:span text:style-name="T18">已選邊：AB=1, BC=2, CD=3 <text:s/>（共 3 條）</text:span></text:p>
            <text:p text:style-name="P20"/>
            <text:p text:style-name="P20"><text:span text:style-name="T18"><text:s text:c="2"/>圖的連線狀態：A──1──B──2──C──3──D <text:s text:c="7"/>E</text:span></text:p>
          </table:table-cell>
        </table:table-row>
      </table:table>
      <text:p text:style-name="P22"/>
      <table:table table:name="表格24" table:style-name="表格24">
        <table:table-column table:style-name="表格24.A"/>
        <table:table-column table:style-name="表格24.B"/>
        <table:table-row table:style-name="表格24.1">
          <table:table-cell table:style-name="表格24.A1" table:number-columns-spanned="2" office:value-type="string">
            <text:p text:style-name="P13"><text:span text:style-name="T3">Step 4：看邊 AC=4 → ⛔ 跳過！</text:span></text:p>
          </table:table-cell>
          <table:covered-table-cell/>
        </table:table-row>
        <table:table-row table:style-name="表格24.1">
          <table:table-cell table:style-name="表格24.A2" office:value-type="string">
            <text:p text:style-name="P8"><text:span text:style-name="T36">Step 4</text:span></text:p>
          </table:table-cell>
          <table:table-cell table:style-name="表格24.B2" office:value-type="string">
            <text:p text:style-name="P20"><text:span text:style-name="T18">Find(A)=A <text:s text:c="3"/>Find(C)=A <text:s text:c="3"/>← 相同集合！加了會成環</text:span></text:p>
            <text:p text:style-name="P20"/>
            <text:p text:style-name="P20"><text:span text:style-name="T18"><text:s text:c="2"/>若加入 A─C：</text:span></text:p>
            <text:p text:style-name="P20"><text:span text:style-name="T18"><text:s text:c="4"/>A──1──B──2──C</text:span></text:p>
            <text:p text:style-name="P20"><text:span text:style-name="T18"><text:s text:c="4"/>└──────────4──┘ <text:s text:c="2"/>← A─B─C─A 形成三角形迴路！</text:span></text:p>
            <text:p text:style-name="P20"/>
            <text:p text:style-name="P20"><text:span text:style-name="T18">⛔ 跳過 AC=4</text:span></text:p>
          </table:table-cell>
        </table:table-row>
      </table:table>
      <text:p text:style-name="P22"/>
      <table:table table:name="表格25" table:style-name="表格25">
        <table:table-column table:style-name="表格25.A"/>
        <table:table-column table:style-name="表格25.B"/>
        <table:table-row table:style-name="表格25.1">
          <table:table-cell table:style-name="表格25.A1" table:number-columns-spanned="2" office:value-type="string">
            <text:p text:style-name="P13"><text:span text:style-name="T3">Step 5：看邊 BD=5 → ⛔ 跳過！</text:span></text:p>
          </table:table-cell>
          <table:covered-table-cell/>
        </table:table-row>
        <table:table-row table:style-name="表格25.1">
          <table:table-cell table:style-name="表格25.A2" office:value-type="string">
            <text:p text:style-name="P8"><text:span text:style-name="T36">Step 5</text:span></text:p>
          </table:table-cell>
          <table:table-cell table:style-name="表格25.B2" office:value-type="string">
            <text:p text:style-name="P20"><text:span text:style-name="T18">Find(B)=A <text:s text:c="3"/>Find(D)=A <text:s text:c="3"/>← 相同集合！加了會成環</text:span></text:p>
            <text:p text:style-name="P20"/>
            <text:p text:style-name="P20"><text:span text:style-name="T18"><text:s text:c="2"/>若加入 B─D：B 和 D 已透過 B─C─D 相連，成環！</text:span></text:p>
            <text:p text:style-name="P20"/>
            <text:p text:style-name="P20"><text:span text:style-name="T18">⛔ 跳過 BD=5</text:span></text:p>
          </table:table-cell>
        </table:table-row>
      </table:table>
      <text:p text:style-name="P22"/>
      <table:table table:name="表格26" table:style-name="表格26">
        <table:table-column table:style-name="表格26.A"/>
        <table:table-column table:style-name="表格26.B"/>
        <table:table-row table:style-name="表格26.1">
          <table:table-cell table:style-name="表格26.A1" table:number-columns-spanned="2" office:value-type="string">
            <text:p text:style-name="P13"><text:span text:style-name="T3">Step 6：選邊 DE=6 ← 最後一條！</text:span></text:p>
          </table:table-cell>
          <table:covered-table-cell/>
        </table:table-row>
        <table:table-row table:style-name="表格26.1">
          <table:table-cell table:style-name="表格26.A2" office:value-type="string">
            <text:p text:style-name="P8"><text:span text:style-name="T22">Step 6</text:span></text:p>
          </table:table-cell>
          <table:table-cell table:style-name="表格26.B2" office:value-type="string">
            <text:p text:style-name="P20"><text:span text:style-name="T18">Find(D)=A <text:s text:c="3"/>Find(E)=E <text:s text:c="3"/>← 不同集合！可以加入</text:span></text:p>
            <text:p text:style-name="P20"><text:span text:style-name="T18">Union(D, E) → {A,B,C,D,E} <text:s/>所有節點都在同一組了！</text:span></text:p>
            <text:p text:style-name="P20"/>
            <text:p text:style-name="P20"><text:span text:style-name="T18">集合狀態：{A,B,C,D,E}</text:span></text:p>
            <text:p text:style-name="P20"><text:span text:style-name="T18">已選邊：AB=1, BC=2, CD=3, DE=6 <text:s/>（共 4 條 = V-1 ✅）</text:span></text:p>
            <text:p text:style-name="P20"/>
            <text:p text:style-name="P20"><text:span text:style-name="T18"><text:s text:c="2"/>圖的連線狀態：A──1──B──2──C──3──D──6──E</text:span></text:p>
            <text:p text:style-name="P20"/>
            <text:p text:style-name="P20"><text:span text:style-name="T18"><text:s text:c="2"/>✅ 所有節點已連通，MST 完成！</text:span></text:p>
          </table:table-cell>
        </table:table-row>
      </table:table>
      <text:p text:style-name="P19"/>
      <table:table table:name="表格27" table:style-name="表格27">
        <table:table-column table:style-name="表格27.A"/>
        <text:soft-page-break/>
        <table:table-row table:style-name="表格27.1">
          <table:table-cell table:style-name="表格27.A1" office:value-type="string">
            <text:p text:style-name="P13"><text:span text:style-name="T32">✅ MST 完成</text:span></text:p>
            <text:p text:style-name="P13"><text:span text:style-name="T13">MST 邊集合：</text:span><text:span text:style-name="T12">AB=1, BC=2, CD=3, DE=6</text:span></text:p>
            <text:p text:style-name="P13"><text:span text:style-name="T13">總權重：</text:span><text:span text:style-name="T12">1 + 2 + 3 + 6 = 12</text:span></text:p>
            <text:p text:style-name="P13"><text:span text:style-name="T13">邊數驗證：</text:span><text:span text:style-name="T12">V-1 = 5-1 = 4 條 <text:s/>✅</text:span></text:p>
          </table:table-cell>
        </table:table-row>
      </table:table>
      <text:p text:style-name="P11"/>
      <text:h text:style-name="P3" text:outline-level="2"><text:span text:style-name="T19">4-4 Kruskal 程式實作（Python）</text:span>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21"><text:span text:style-name="T35"># ─── Union-Find 資料結構 ───────────────────────────────</text:span></text:p>
            <text:p text:style-name="P21"><text:span text:style-name="T35">class UnionFind:</text:span></text:p>
            <text:p text:style-name="P21"><text:span text:style-name="T35"><text:s text:c="4"/>def __init__(self, n):</text:span></text:p>
            <text:p text:style-name="P21"><text:span text:style-name="T35"><text:s text:c="8"/># parent[i] = i 的代表人；一開始每個人代表自己</text:span></text:p>
            <text:p text:style-name="P21"><text:span text:style-name="T35"><text:s text:c="8"/>self.parent = list(range(n))</text:span></text:p>
            <text:p text:style-name="P21"><text:span text:style-name="T35"><text:s text:c="8"/># rank 用來讓樹不要長太高（優化用）</text:span></text:p>
            <text:p text:style-name="P21"><text:span text:style-name="T35"><text:s text:c="8"/>self.rank <text:s text:c="2"/>= [0] * n</text:span></text:p>
            <text:p text:style-name="P21"/>
            <text:p text:style-name="P21"><text:span text:style-name="T35"><text:s text:c="4"/>def find(self, x):</text:span></text:p>
            <text:p text:style-name="P21"><text:span text:style-name="T35"><text:s text:c="8"/># 找 x 的代表人，並「路徑壓縮」（讓所有節點直接指向代表人）</text:span></text:p>
            <text:p text:style-name="P21"><text:span text:style-name="T35"><text:s text:c="8"/>if self.parent[x] != x:</text:span></text:p>
            <text:p text:style-name="P21"><text:span text:style-name="T35"><text:s text:c="12"/>self.parent[x] = self.find(self.parent[x]) <text:s/># 遞迴壓縮</text:span></text:p>
            <text:p text:style-name="P21"><text:span text:style-name="T35"><text:s text:c="8"/>return self.parent[x]</text:span></text:p>
            <text:p text:style-name="P21"/>
            <text:p text:style-name="P21"><text:span text:style-name="T35"><text:s text:c="4"/>def union(self, x, y):</text:span></text:p>
            <text:p text:style-name="P21"><text:span text:style-name="T35"><text:s text:c="8"/># 合併 x 和 y 的組，若已同組回傳 False（加了會成環）</text:span></text:p>
            <text:p text:style-name="P21"><text:span text:style-name="T35"><text:s text:c="8"/>rx, ry = self.find(x), self.find(y)</text:span></text:p>
            <text:p text:style-name="P21"><text:span text:style-name="T35"><text:s text:c="8"/>if rx == ry:</text:span></text:p>
            <text:p text:style-name="P21"><text:span text:style-name="T35"><text:s text:c="12"/>return False <text:s text:c="2"/># ← 同集合，跳過！</text:span></text:p>
            <text:p text:style-name="P21"><text:span text:style-name="T35"><text:s text:c="8"/># 按 rank 合併（讓樹保持較矮）</text:span></text:p>
            <text:p text:style-name="P21"><text:span text:style-name="T35"><text:s text:c="8"/>if self.rank[rx] &lt; self.rank[ry]:</text:span></text:p>
            <text:p text:style-name="P21"><text:span text:style-name="T35"><text:s text:c="12"/>rx, ry = ry, rx</text:span></text:p>
            <text:p text:style-name="P21"><text:span text:style-name="T35"><text:s text:c="8"/>self.parent[ry] = rx</text:span></text:p>
            <text:p text:style-name="P21"><text:span text:style-name="T35"><text:s text:c="8"/>if self.rank[rx] == self.rank[ry]:</text:span></text:p>
            <text:p text:style-name="P21"><text:span text:style-name="T35"><text:s text:c="12"/>self.rank[rx] += 1</text:span></text:p>
            <text:p text:style-name="P21"><text:span text:style-name="T35"><text:s text:c="8"/>return True</text:span></text:p>
            <text:p text:style-name="P21"/>
            <text:p text:style-name="P21"><text:span text:style-name="T35"># ─── Kruskal 主演算法 ──────────────────────────────────</text:span></text:p>
            <text:p text:style-name="P21"><text:span text:style-name="T35">def kruskal(n, edges):</text:span></text:p>
            <text:p text:style-name="P21"><text:span text:style-name="T35"><text:s text:c="4"/>"""</text:span></text:p>
            <text:p text:style-name="P21"><text:span text:style-name="T35"><text:s text:c="4"/>n: <text:s text:c="4"/>節點數量（節點編號 0 到 n-1）</text:span></text:p>
            <text:p text:style-name="P21"><text:span text:style-name="T35"><text:s text:c="4"/>edges: [(權重, 節點u, 節點v), ...] <text:s/>所有邊的清單</text:span></text:p>
            <text:p text:style-name="P21"><text:span text:style-name="T35"><text:s text:c="4"/>回傳：MST 邊清單和總權重</text:span></text:p>
            <text:p text:style-name="P21"><text:span text:style-name="T35"><text:s text:c="4"/>"""</text:span></text:p>
            <text:p text:style-name="P21"><text:span text:style-name="T35"><text:s text:c="4"/>edges.sort() <text:s text:c="8"/># Step 1：所有邊由小到大排序</text:span></text:p>
            <text:p text:style-name="P21"><text:span text:style-name="T35"><text:s text:c="4"/>uf = UnionFind(n) <text:s text:c="3"/># Step 2：初始化 Union-Find</text:span></text:p>
            <text:p text:style-name="P21"><text:span text:style-name="T35"><text:s text:c="4"/>mst = []</text:span></text:p>
            <text:p text:style-name="P21"><text:span text:style-name="T35"><text:s text:c="4"/>total = 0</text:span></text:p>
            <text:p text:style-name="P21"/>
            <text:p text:style-name="P21"><text:span text:style-name="T35"><text:s text:c="4"/>for w, u, v in edges: <text:s text:c="5"/># Step 3：依序處理每條邊</text:span></text:p>
            <text:p text:style-name="P21"><text:span text:style-name="T35"><text:s text:c="8"/>if uf.union(u, v): <text:s text:c="4"/># 不同集合 → 可以加</text:span></text:p>
            <text:p text:style-name="P21"><text:span text:style-name="T35"><text:s text:c="12"/>mst.append((w, u, v))</text:span></text:p>
            <text:p text:style-name="P21"><text:span text:style-name="T35"><text:s text:c="12"/>total += w</text:span></text:p>
            <text:p text:style-name="P21"><text:span text:style-name="T35"><text:s text:c="8"/># 同集合 → union 回傳 False → 自動跳過</text:span></text:p>
            <text:p text:style-name="P21"><text:span text:style-name="T35"><text:s text:c="8"/>if len(mst) == n - 1: <text:s/># 已選 V-1 條邊 → 完成！</text:span></text:p>
            <text:p text:style-name="P21"><text:span text:style-name="T35"><text:s text:c="12"/>break</text:span></text:p>
            <text:p text:style-name="P21"/>
            <text:p text:style-name="P21"><text:span text:style-name="T35"><text:s text:c="4"/>return mst, total</text:span></text:p>
            <text:p text:style-name="P21"><text:soft-page-break/></text:p>
            <text:p text:style-name="P21"><text:span text:style-name="T35"># ─── 測試：5節點範例 ────────────────────────────────────</text:span></text:p>
            <text:p text:style-name="P21"><text:span text:style-name="T35"># 節點：0=A, 1=B, 2=C, 3=D, 4=E</text:span></text:p>
            <text:p text:style-name="P21"><text:span text:style-name="T35">n = 5</text:span></text:p>
            <text:p text:style-name="P21"><text:span text:style-name="T35">edges = [</text:span></text:p>
            <text:p text:style-name="P21"><text:span text:style-name="T35"><text:s text:c="4"/>(1,0,1), <text:s/># A─B = 1</text:span></text:p>
            <text:p text:style-name="P21"><text:span text:style-name="T35"><text:s text:c="4"/>(2,1,2), <text:s/># B─C = 2</text:span></text:p>
            <text:p text:style-name="P21"><text:span text:style-name="T35"><text:s text:c="4"/>(3,2,3), <text:s/># C─D = 3</text:span></text:p>
            <text:p text:style-name="P21"><text:span text:style-name="T35"><text:s text:c="4"/>(4,0,2), <text:s/># A─C = 4</text:span></text:p>
            <text:p text:style-name="P21"><text:span text:style-name="T35"><text:s text:c="4"/>(5,1,3), <text:s/># B─D = 5</text:span></text:p>
            <text:p text:style-name="P21"><text:span text:style-name="T35"><text:s text:c="4"/>(6,3,4), <text:s/># D─E = 6</text:span></text:p>
            <text:p text:style-name="P21"><text:span text:style-name="T35"><text:s text:c="4"/>(8,2,4), <text:s/># C─E = 8</text:span></text:p>
            <text:p text:style-name="P21"><text:span text:style-name="T35">]</text:span></text:p>
            <text:p text:style-name="P21"><text:span text:style-name="T35">mst, total = kruskal(n, edges)</text:span></text:p>
            <text:p text:style-name="P21"><text:span text:style-name="T35">print('MST 邊：', mst) <text:s text:c="3"/># [(1,0,1), (2,1,2), (3,2,3), (6,3,4)]</text:span></text:p>
            <text:p text:style-name="P21"><text:span text:style-name="T35">print('總權重：', total) <text:s text:c="2"/># 12</text:span></text:p>
          </table:table-cell>
        </table:table-row>
      </table:table>
      <text:h text:style-name="P2" text:outline-level="1"><text:span text:style-name="T8">五、Sollin（Borůvka）演算法 ── 大家同時搶最便宜的邊</text:span></text:h>
      <text:h text:style-name="P3" text:outline-level="2"><text:span text:style-name="T19">5-1 核心概念（超新手版解釋）</text:span></text:h>
      <text:p text:style-name="P13"><text:span text:style-name="T12">想像很多個小部落（每個節點是一個部落），大家同時公告「我要接通的最便宜鄰居」，然後按這些公告同時合併。合併後變成幾個大部落，再重複一輪，直到只剩一個大部落。</text:span></text:p>
      <text:p text:style-name="P13"><text:span text:style-name="T12">這就是 Sollin 最大的特色：不是一個個慢慢來，而是「全體同時行動」，因此非常適合分散式系統（每台電腦各自計算）。</text:span></text:p>
      <text:p text:style-name="P15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3"><text:span text:style-name="T29">Sollin 執行步驟（只有4步）：</text:span></text:p>
            <text:list text:continue-numbering="true" text:style-name="WWNum2">
              <text:list-item>
                <text:p text:style-name="P4"><text:span text:style-name="T12">初始：每個節點自成一個 Component（一個小圓圈）。</text:span></text:p>
              </text:list-item>
              <text:list-item>
                <text:p text:style-name="P4"><text:span text:style-name="T12">同一輪：每個 Component 掃描自己能連出去的所有邊，找出「最便宜的外連邊」。</text:span></text:p>
              </text:list-item>
              <text:list-item>
                <text:p text:style-name="P4"><text:span text:style-name="T12">把所有被選中的邊一起加入 MST（若兩個 Component 互選同一條邊，只算一次）。</text:span></text:p>
              </text:list-item>
              <text:list-item>
                <text:p text:style-name="P4"><text:span text:style-name="T12">合併後重新算 Component，重複步驟②③，直到只剩一個 Component。</text:span></text:p>
              </text:list-item>
            </text:list>
            <text:p text:style-name="P17"/>
            <text:p text:style-name="P13"><text:span text:style-name="T23">別名：</text:span><text:span text:style-name="T12">Sollin 和 Borůvka 是同一個演算法，兩個名字都可能出現在考試！</text:span></text:p>
          </table:table-cell>
        </table:table-row>
      </table:table>
      <text:p text:style-name="P11"/>
      <text:h text:style-name="P3" text:outline-level="2"><text:span text:style-name="T19">5-2 完整圖解範例（5個節點，圖片原題）</text:span></text:h>
      <text:p text:style-name="P13"><text:span text:style-name="T12">範例：5個節點 A, B, C, D, E。各節點最短外連邊如下（來自原始圖片）：</text:span></text:p>
      <text:p text:style-name="P19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8"><text:span text:style-name="T18"><text:s text:c="2"/>各節點選擇的最短外連邊：</text:span></text:p>
            <text:p text:style-name="P18"/>
            <text:p text:style-name="P18"><text:span text:style-name="T18"><text:s text:c="4"/>A → (A,D)=14 <text:s text:c="3"/>B → (B,C)=15 <text:s text:c="3"/>C → (C,D)=13</text:span></text:p>
            <text:p text:style-name="P18"><text:span text:style-name="T18"><text:s text:c="4"/>D → (D,E)=12 <text:s text:c="3"/>E → (D,E)=12 <text:s/>（D 和 E 都選同一條邊！）</text:span></text:p>
            <text:p text:style-name="P18"/>
            <text:p text:style-name="P18"><text:span text:style-name="T18"><text:s text:c="2"/>初始 Component：{A} <text:s/>{B} <text:s/>{C} <text:s/>{D} <text:s/>{E}</text:span></text:p>
          </table:table-cell>
        </table:table-row>
      </table:table>
      <text:p text:style-name="P15"/>
      <table:table table:name="表格31" table:style-name="表格31">
        <table:table-column table:style-name="表格31.A"/>
        <table:table-column table:style-name="表格31.B"/>
        <table:table-row table:style-name="表格31.1">
          <table:table-cell table:style-name="表格31.A1" table:number-columns-spanned="2" office:value-type="string">
            <text:p text:style-name="P13"><text:span text:style-name="T3">Step 1：第一輪：所有 Component 同時找最短外連邊</text:span></text:p>
          </table:table-cell>
          <table:covered-table-cell/>
        </table:table-row>
        <table:table-row table:style-name="表格31.1">
          <table:table-cell table:style-name="表格31.A2" office:value-type="string">
            <text:p text:style-name="P8"><text:span text:style-name="T22">Step 1</text:span></text:p>
          </table:table-cell>
          <table:table-cell table:style-name="表格31.B2" office:value-type="string">
            <text:p text:style-name="P20"><text:span text:style-name="T18"><text:s text:c="2"/>Component {A}：最短外連邊 = (A,D)=14 <text:s/>→ 提名 A─D</text:span></text:p>
            <text:p text:style-name="P20"><text:span text:style-name="T18"><text:s text:c="2"/>Component {B}：最短外連邊 = (B,C)=15 <text:s/>→ 提名 B─C</text:span></text:p>
            <text:p text:style-name="P20"><text:soft-page-break/><text:span text:style-name="T18"><text:s text:c="2"/>Component {C}：最短外連邊 = (C,D)=13 <text:s/>→ 提名 C─D</text:span></text:p>
            <text:p text:style-name="P20"><text:span text:style-name="T18"><text:s text:c="2"/>Component {D}：最短外連邊 = (D,E)=12 <text:s/>→ 提名 D─E</text:span></text:p>
            <text:p text:style-name="P20"><text:span text:style-name="T18"><text:s text:c="2"/>Component {E}：最短外連邊 = (D,E)=12 <text:s/>→ 提名 D─E（同一條，只算一次）</text:span></text:p>
            <text:p text:style-name="P20"/>
            <text:p text:style-name="P20"><text:span text:style-name="T18"><text:s text:c="2"/>本輪加入邊：A─D=14, B─C=15, C─D=13, D─E=12</text:span></text:p>
            <text:p text:style-name="P20"/>
            <text:p text:style-name="P20"><text:span text:style-name="T18"><text:s text:c="2"/>合併後：{A,D,E} + {C,D} = {A,C,D,E} <text:s/>再加 {B,C} → {A,B,C,D,E}</text:span></text:p>
            <text:p text:style-name="P20"/>
            <text:p text:style-name="P20"><text:span text:style-name="T18"><text:s text:c="2"/>最終 MST 樣子：</text:span></text:p>
            <text:p text:style-name="P20"><text:span text:style-name="T18"><text:s text:c="4"/>B──15──C──13──D──12──E</text:span></text:p>
            <text:p text:style-name="P20"><text:span text:style-name="T18"><text:s text:c="18"/>│</text:span></text:p>
            <text:p text:style-name="P20"><text:span text:style-name="T18"><text:s text:c="17"/>14</text:span></text:p>
            <text:p text:style-name="P20"><text:span text:style-name="T18"><text:s text:c="18"/>│</text:span></text:p>
            <text:p text:style-name="P20"><text:span text:style-name="T18"><text:s text:c="18"/>A</text:span></text:p>
          </table:table-cell>
        </table:table-row>
      </table:table>
      <text:p text:style-name="P19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13"><text:span text:style-name="T31">✅ 一輪就完成！所有節點連成一個 Component</text:span></text:p>
            <text:p text:style-name="P13"><text:span text:style-name="T13">MST 邊集合：</text:span><text:span text:style-name="T12">A─D=14, B─C=15, C─D=13, D─E=12</text:span></text:p>
            <text:p text:style-name="P13"><text:span text:style-name="T13">總權重：</text:span><text:span text:style-name="T12">14 + 15 + 13 + 12 = 54</text:span></text:p>
            <text:p text:style-name="P13"><text:span text:style-name="T13">邊數驗證：</text:span><text:span text:style-name="T12">V-1 = 5-1 = 4 條 <text:s/>✅</text:span></text:p>
          </table:table-cell>
        </table:table-row>
      </table:table>
      <text:p text:style-name="P11"/>
      <text:h text:style-name="P3" text:outline-level="2"><text:span text:style-name="T19">5-3 需要兩輪的範例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8"><text:span text:style-name="T18"><text:s text:c="2"/>範例圖：A─1─B，B─4─C，C─2─D，A─5─D</text:span></text:p>
            <text:p text:style-name="P18"/>
            <text:p text:style-name="P18"><text:span text:style-name="T18"><text:s text:c="2"/>初始 Component：{A} <text:s/>{B} <text:s/>{C} <text:s/>{D}</text:span></text:p>
            <text:p text:style-name="P18"/>
            <text:p text:style-name="P18"><text:span text:style-name="T18"><text:s text:c="2"/>───── 第一輪 ──────────────────────────────────────────</text:span></text:p>
            <text:p text:style-name="P18"><text:span text:style-name="T18"><text:s text:c="2"/>{A}：最短外連邊 = A─B=1 <text:s/>→ 提名 A─B</text:span></text:p>
            <text:p text:style-name="P18"><text:span text:style-name="T18"><text:s text:c="2"/>{B}：最短外連邊 = A─B=1 <text:s/>→ 提名 A─B（同一條）</text:span></text:p>
            <text:p text:style-name="P18"><text:span text:style-name="T18"><text:s text:c="2"/>{C}：最短外連邊 = C─D=2 <text:s/>→ 提名 C─D</text:span></text:p>
            <text:p text:style-name="P18"><text:span text:style-name="T18"><text:s text:c="2"/>{D}：最短外連邊 = C─D=2 <text:s/>→ 提名 C─D（同一條）</text:span></text:p>
            <text:p text:style-name="P18"/>
            <text:p text:style-name="P18"><text:span text:style-name="T18"><text:s text:c="2"/>加入：A─B=1, C─D=2</text:span></text:p>
            <text:p text:style-name="P18"><text:span text:style-name="T18"><text:s text:c="2"/>合併後 Component：{A,B} <text:s/>{C,D}</text:span></text:p>
            <text:p text:style-name="P18"/>
            <text:p text:style-name="P18"><text:span text:style-name="T18"><text:s text:c="2"/>───── 第二輪 ──────────────────────────────────────────</text:span></text:p>
            <text:p text:style-name="P18"><text:span text:style-name="T18"><text:s text:c="2"/>{A,B}：最短外連邊 = B─C=4 <text:s/>→ 提名 B─C</text:span></text:p>
            <text:p text:style-name="P18"><text:span text:style-name="T18"><text:s text:c="2"/>{C,D}：最短外連邊 = B─C=4 <text:s/>→ 提名 B─C（同一條）</text:span></text:p>
            <text:p text:style-name="P18"/>
            <text:p text:style-name="P18"><text:span text:style-name="T18"><text:s text:c="2"/>加入：B─C=4</text:span></text:p>
            <text:p text:style-name="P18"><text:span text:style-name="T18"><text:s text:c="2"/>合併後 Component：{A,B,C,D} <text:s/>← 只剩一個！完成！</text:span></text:p>
            <text:p text:style-name="P18"/>
            <text:p text:style-name="P18"><text:span text:style-name="T18"><text:s text:c="2"/>MST = A─B=1, C─D=2, B─C=4 <text:s text:c="4"/>總重 = 7</text:span></text:p>
          </table:table-cell>
        </table:table-row>
      </table:table>
      <text:p text:style-name="P11"/>
      <text:h text:style-name="P3" text:outline-level="2"><text:span text:style-name="T19">5-4 Sollin 程式實作（Python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21"><text:span text:style-name="T35">def sollin(n, edges):</text:span></text:p>
            <text:p text:style-name="P21"><text:span text:style-name="T35"><text:s text:c="4"/>"""</text:span></text:p>
            <text:p text:style-name="P21"><text:span text:style-name="T35"><text:s text:c="4"/>n: <text:s text:c="4"/>節點數量</text:span></text:p>
            <text:p text:style-name="P21"><text:soft-page-break/><text:span text:style-name="T35"><text:s text:c="4"/>edges: [(權重, u, v), ...]</text:span></text:p>
            <text:p text:style-name="P21"><text:span text:style-name="T35"><text:s text:c="4"/>"""</text:span></text:p>
            <text:p text:style-name="P21"><text:span text:style-name="T35"><text:s text:c="4"/># ── Union-Find 工具函式（內嵌版）────────────────</text:span></text:p>
            <text:p text:style-name="P21"><text:span text:style-name="T35"><text:s text:c="4"/>parent = list(range(n)) <text:s text:c="2"/># 每個節點的代表人</text:span></text:p>
            <text:p text:style-name="P21"/>
            <text:p text:style-name="P21"><text:span text:style-name="T35"><text:s text:c="4"/>def find(x): <text:s text:c="13"/># 找代表人（含路徑壓縮）</text:span></text:p>
            <text:p text:style-name="P21"><text:span text:style-name="T35"><text:s text:c="8"/>while parent[x] != x:</text:span></text:p>
            <text:p text:style-name="P21"><text:span text:style-name="T35"><text:s text:c="12"/>parent[x] = parent[parent[x]] <text:s text:c="2"/># 路徑壓縮</text:span></text:p>
            <text:p text:style-name="P21"><text:span text:style-name="T35"><text:s text:c="12"/>x = parent[x]</text:span></text:p>
            <text:p text:style-name="P21"><text:span text:style-name="T35"><text:s text:c="8"/>return x</text:span></text:p>
            <text:p text:style-name="P21"/>
            <text:p text:style-name="P21"><text:span text:style-name="T35"><text:s text:c="4"/>def union(x, y): <text:s text:c="9"/># 合併兩組，同組回傳 False</text:span></text:p>
            <text:p text:style-name="P21"><text:span text:style-name="T35"><text:s text:c="8"/>px, py = find(x), find(y)</text:span></text:p>
            <text:p text:style-name="P21"><text:span text:style-name="T35"><text:s text:c="8"/>if px == py: return False</text:span></text:p>
            <text:p text:style-name="P21"><text:span text:style-name="T35"><text:s text:c="8"/>parent[px] = py</text:span></text:p>
            <text:p text:style-name="P21"><text:span text:style-name="T35"><text:s text:c="8"/>return True</text:span></text:p>
            <text:p text:style-name="P21"/>
            <text:p text:style-name="P21"><text:span text:style-name="T35"><text:s text:c="4"/># ── 主迴圈 ──────────────────────────────────────</text:span></text:p>
            <text:p text:style-name="P21"><text:span text:style-name="T35"><text:s text:c="4"/>mst = []</text:span></text:p>
            <text:p text:style-name="P21"><text:span text:style-name="T35"><text:s text:c="4"/>total = 0</text:span></text:p>
            <text:p text:style-name="P21"/>
            <text:p text:style-name="P21"><text:span text:style-name="T35"><text:s text:c="4"/>while True:</text:span></text:p>
            <text:p text:style-name="P21"><text:span text:style-name="T35"><text:s text:c="8"/># 計算目前 Component 數量（代表人不同 = 不同 Component）</text:span></text:p>
            <text:p text:style-name="P21"><text:span text:style-name="T35"><text:s text:c="8"/>comps = len(set(find(i) for i in range(n)))</text:span></text:p>
            <text:p text:style-name="P21"><text:span text:style-name="T35"><text:s text:c="8"/>if comps == 1:</text:span></text:p>
            <text:p text:style-name="P21"><text:span text:style-name="T35"><text:s text:c="12"/>break <text:s text:c="2"/># 只剩一個 Component → MST 完成！</text:span></text:p>
            <text:p text:style-name="P21"/>
            <text:p text:style-name="P21"><text:span text:style-name="T35"><text:s text:c="8"/># 每個 Component 找自己的最短外連邊</text:span></text:p>
            <text:p text:style-name="P21"><text:span text:style-name="T35"><text:s text:c="8"/># cheapest[Component代表人] = (最小權重, 節點u, 節點v)</text:span></text:p>
            <text:p text:style-name="P21"><text:span text:style-name="T35"><text:s text:c="8"/>cheapest = {}</text:span></text:p>
            <text:p text:style-name="P21"><text:span text:style-name="T35"><text:s text:c="8"/>for w, u, v in edges:</text:span></text:p>
            <text:p text:style-name="P21"><text:span text:style-name="T35"><text:s text:c="12"/>ru, rv = find(u), find(v)</text:span></text:p>
            <text:p text:style-name="P21"><text:span text:style-name="T35"><text:s text:c="12"/>if ru == rv: continue <text:s text:c="2"/># 同 Component，略過</text:span></text:p>
            <text:p text:style-name="P21"><text:span text:style-name="T35"><text:s text:c="12"/># 更新 Component ru 的最便宜外連邊</text:span></text:p>
            <text:p text:style-name="P21"><text:span text:style-name="T35"><text:s text:c="12"/>if ru not in cheapest or w &lt; cheapest[ru][0]:</text:span></text:p>
            <text:p text:style-name="P21"><text:span text:style-name="T35"><text:s text:c="16"/>cheapest[ru] = (w, u, v)</text:span></text:p>
            <text:p text:style-name="P21"><text:span text:style-name="T35"><text:s text:c="12"/># 更新 Component rv 的最便宜外連邊</text:span></text:p>
            <text:p text:style-name="P21"><text:span text:style-name="T35"><text:s text:c="12"/>if rv not in cheapest or w &lt; cheapest[rv][0]:</text:span></text:p>
            <text:p text:style-name="P21"><text:span text:style-name="T35"><text:s text:c="16"/>cheapest[rv] = (w, u, v)</text:span></text:p>
            <text:p text:style-name="P21"/>
            <text:p text:style-name="P21"><text:span text:style-name="T35"><text:s text:c="8"/># 把所有最短外連邊加入 MST（union 確保不重複）</text:span></text:p>
            <text:p text:style-name="P21"><text:span text:style-name="T35"><text:s text:c="8"/>for w, u, v in cheapest.values():</text:span></text:p>
            <text:p text:style-name="P21"><text:span text:style-name="T35"><text:s text:c="12"/>if union(u, v): <text:s text:c="2"/># 不同 Component → 加入</text:span></text:p>
            <text:p text:style-name="P21"><text:span text:style-name="T35"><text:s text:c="16"/>mst.append((w, u, v))</text:span></text:p>
            <text:p text:style-name="P21"><text:span text:style-name="T35"><text:s text:c="16"/>total += w</text:span></text:p>
            <text:p text:style-name="P21"/>
            <text:p text:style-name="P21"><text:span text:style-name="T35"><text:s text:c="4"/>return mst, total</text:span></text:p>
            <text:p text:style-name="P21"/>
            <text:p text:style-name="P21"><text:span text:style-name="T35"># ─── 測試 ──────────────────────────────────────────</text:span></text:p>
            <text:p text:style-name="P21"><text:span text:style-name="T35">n = 4 <text:s/># A=0, B=1, C=2, D=3</text:span></text:p>
            <text:p text:style-name="P21"><text:span text:style-name="T35">edges = [(1,0,1),(4,0,3),(4,1,2),(2,2,3)] <text:s/># AB=1,AD=4,BC=4,CD=2</text:span></text:p>
            <text:p text:style-name="P21"><text:span text:style-name="T35">mst, total = sollin(n, edges)</text:span></text:p>
            <text:p text:style-name="P21"><text:span text:style-name="T35">print('MST:', mst) <text:s text:c="6"/># 包含 AB=1, CD=2, BC=4</text:span></text:p>
            <text:p text:style-name="P21"><text:span text:style-name="T35">print('Total:', total) <text:s text:c="2"/># 7</text:span></text:p>
          </table:table-cell>
        </table:table-row>
      </table:table>
      <text:p text:style-name="P11"/>
      <text:h text:style-name="P3" text:outline-level="2"><text:soft-page-break/><text:span text:style-name="T19">5-5 為什麼 Sollin 適合分散式計算？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8"><text:span text:style-name="T18"><text:s text:c="2"/>Prim（必須一個中央節點主控）： <text:s text:c="3"/>Sollin（每台電腦各自計算）：</text:span></text:p>
            <text:p text:style-name="P18"/>
            <text:p text:style-name="P18"><text:span text:style-name="T18"><text:s text:c="2"/>中央節點 A <text:s text:c="24"/>電腦1 <text:s text:c="2"/>電腦2 <text:s text:c="2"/>電腦3 <text:s text:c="2"/>電腦4</text:span></text:p>
            <text:p text:style-name="P18"><text:span text:style-name="T18"><text:s text:c="5"/>│ <text:s text:c="32"/>↓ <text:s text:c="6"/>↓ <text:s text:c="6"/>↓ <text:s text:c="6"/>↓</text:span></text:p>
            <text:p text:style-name="P18"><text:span text:style-name="T18"><text:s text:c="2"/>一步步往外 <text:s text:c="23"/>各自找自己最短外連邊（同時進行！）</text:span></text:p>
            <text:p text:style-name="P18"><text:span text:style-name="T18"><text:s text:c="2"/>只有一個節點在工作 <text:s text:c="18"/>↓ <text:s text:c="6"/>↓ <text:s text:c="6"/>↓ <text:s text:c="6"/>↓</text:span></text:p>
            <text:p text:style-name="P18"><text:span text:style-name="T18"><text:s text:c="2"/>→ 無法平行化 <text:s text:c="22"/>統一回報 → 同時合併</text:span></text:p>
            <text:p text:style-name="P18"/>
            <text:p text:style-name="P18"><text:span text:style-name="T18"><text:s text:c="2"/>Sollin 每輪所有 Component 同時計算，不需要一個中央控制點，</text:span></text:p>
            <text:p text:style-name="P18"><text:span text:style-name="T18"><text:s text:c="2"/>因此特別適合 Google Maps 路網計算、超大規模網路拓樸分析。</text:span></text:p>
          </table:table-cell>
        </table:table-row>
      </table:table>
      <text:h text:style-name="P2" text:outline-level="1"><text:span text:style-name="T8">六、113閩 Q5 ── Kruskal 公職真題完整解題</text:span></text:h>
      <text:h text:style-name="P3" text:outline-level="2"><text:span text:style-name="T19">6-1 題目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3"><text:span text:style-name="T17">題目：</text:span></text:p>
            <text:p text:style-name="P13"><text:span text:style-name="T12">圖 G 有 7 個節點：a, b, c, d, e, f, g</text:span></text:p>
            <text:p text:style-name="P13"><text:span text:style-name="T12">所有邊（格式：節點─節點 = 權重）：</text:span></text:p>
            <text:p text:style-name="P13"><text:span text:style-name="T12">a─b=13　　a─c=9　　a─d=10　　b─d=16　　c─d=12</text:span></text:p>
            <text:p text:style-name="P13"><text:span text:style-name="T12">c─e=2　　　c─f=3　　　d─g=18　　　e─f=4　　　f─g=6</text:span></text:p>
            <text:p text:style-name="P17"/>
            <text:p text:style-name="P13"><text:span text:style-name="T12">請用 Kruskal 演算法找出 MST 及總權重。</text:span></text:p>
          </table:table-cell>
        </table:table-row>
      </table:table>
      <text:p text:style-name="P15"/>
      <text:h text:style-name="P3" text:outline-level="2"><text:span text:style-name="T19">6-2 先畫出圖的結構</text:span>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8"><text:span text:style-name="T18"><text:s text:c="2"/>圖的連線示意（看懂這張圖，解題就簡單了）：</text:span></text:p>
            <text:p text:style-name="P18"/>
            <text:p text:style-name="P18"><text:span text:style-name="T18"><text:s text:c="13"/>b</text:span></text:p>
            <text:p text:style-name="P18"><text:span text:style-name="T18"><text:s text:c="12"/>/ \</text:span></text:p>
            <text:p text:style-name="P18"><text:span text:style-name="T18"><text:s text:c="10"/>13 <text:s text:c="2"/>16</text:span></text:p>
            <text:p text:style-name="P18"><text:span text:style-name="T18"><text:s text:c="10"/>/ <text:s text:c="4"/>\</text:span></text:p>
            <text:p text:style-name="P18"><text:span text:style-name="T18"><text:s text:c="9"/>a──10───d──18──g</text:span></text:p>
            <text:p text:style-name="P18"><text:span text:style-name="T18"><text:s text:c="10"/>\ <text:s text:c="5"/>| <text:s text:c="6"/>\</text:span></text:p>
            <text:p text:style-name="P18"><text:span text:style-name="T18"><text:s text:c="11"/>9 <text:s text:c="3"/>12 <text:s text:c="7"/>6</text:span></text:p>
            <text:p text:style-name="P18"><text:span text:style-name="T18"><text:s text:c="12"/>\ <text:s text:c="3"/>| <text:s text:c="8"/>\</text:span></text:p>
            <text:p text:style-name="P18"><text:span text:style-name="T18"><text:s text:c="13"/>c──3──f────6───+</text:span></text:p>
            <text:p text:style-name="P18"><text:span text:style-name="T18"><text:s text:c="13"/>| <text:s text:c="5"/>|</text:span></text:p>
            <text:p text:style-name="P18"><text:span text:style-name="T18"><text:s text:c="13"/>2 <text:s text:c="5"/>4</text:span></text:p>
            <text:p text:style-name="P18"><text:span text:style-name="T18"><text:s text:c="13"/>| <text:s text:c="5"/>|</text:span></text:p>
            <text:p text:style-name="P18"><text:span text:style-name="T18"><text:s text:c="13"/>e──────+ <text:s text:c="2"/>(c─e=2, e─f=4, c─f=3)</text:span></text:p>
            <text:p text:style-name="P18"/>
            <text:p text:style-name="P18"><text:span text:style-name="T18"><text:s text:c="2"/>注意：c 連著好幾條邊！c─e=2, c─f=3, c─d=12, a─c=9</text:span></text:p>
            <text:p text:style-name="P18"><text:span text:style-name="T18"><text:s text:c="8"/>這些是解題時最容易混淆的地方，要特別注意。</text:span></text:p>
          </table:table-cell>
        </table:table-row>
      </table:table>
      <text:p text:style-name="P15"/>
      <text:h text:style-name="P3" text:outline-level="2"><text:span text:style-name="T19">6-3 Step 1：所有邊排序</text:span></text:h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8"><text:span text:style-name="T18"><text:s text:c="2"/>10條邊，依權重由小到大排序：</text:span></text:p>
            <text:p text:style-name="P18"/>
            <text:p text:style-name="P18"><text:soft-page-break/><text:span text:style-name="T18"><text:s text:c="2"/>排序 <text:s/>邊 <text:s text:c="10"/>權重 <text:s text:c="3"/>說明</text:span></text:p>
            <text:p text:style-name="P18"><text:span text:style-name="T18"><text:s text:c="2"/>────────────────────────────────────────</text:span></text:p>
            <text:p text:style-name="P18"><text:span text:style-name="T18"><text:s text:c="4"/>1 <text:s text:c="2"/>(c, e) <text:s text:c="8"/>2 <text:s text:c="3"/>← c 和 e 直接連，最便宜</text:span></text:p>
            <text:p text:style-name="P18"><text:span text:style-name="T18"><text:s text:c="4"/>2 <text:s text:c="2"/>(c, f) <text:s text:c="8"/>3 <text:s text:c="3"/>← c 和 f 直接連</text:span></text:p>
            <text:p text:style-name="P18"><text:span text:style-name="T18"><text:s text:c="4"/>3 <text:s text:c="2"/>(e, f) <text:s text:c="8"/>4 <text:s text:c="3"/>← e 和 f 直接連</text:span></text:p>
            <text:p text:style-name="P18"><text:span text:style-name="T18"><text:s text:c="4"/>4 <text:s text:c="2"/>(f, g) <text:s text:c="8"/>6 <text:s text:c="3"/>← f 和 g 直接連</text:span></text:p>
            <text:p text:style-name="P18"><text:span text:style-name="T18"><text:s text:c="4"/>5 <text:s text:c="2"/>(a, c) <text:s text:c="8"/>9 <text:s text:c="3"/>← a 和 c 直接連</text:span></text:p>
            <text:p text:style-name="P18"><text:span text:style-name="T18"><text:s text:c="4"/>6 <text:s text:c="2"/>(a, d) <text:s text:c="7"/>10 <text:s text:c="3"/>← a 和 d 直接連</text:span></text:p>
            <text:p text:style-name="P18"><text:span text:style-name="T18"><text:s text:c="4"/>7 <text:s text:c="2"/>(c, d) <text:s text:c="7"/>12 <text:s text:c="3"/>← c 和 d 直接連</text:span></text:p>
            <text:p text:style-name="P18"><text:span text:style-name="T18"><text:s text:c="4"/>8 <text:s text:c="2"/>(a, b) <text:s text:c="7"/>13 <text:s text:c="3"/>← a 和 b 直接連</text:span></text:p>
            <text:p text:style-name="P18"><text:span text:style-name="T18"><text:s text:c="4"/>9 <text:s text:c="2"/>(b, d) <text:s text:c="7"/>16</text:span></text:p>
            <text:p text:style-name="P18"><text:span text:style-name="T18"><text:s text:c="3"/>10 <text:s text:c="2"/>(d, g) <text:s text:c="7"/>18 <text:s text:c="3"/>← 最貴</text:span></text:p>
          </table:table-cell>
        </table:table-row>
      </table:table>
      <text:p text:style-name="P15"/>
      <text:h text:style-name="P3" text:outline-level="2"><text:span text:style-name="T19">6-4 Step 2：逐條執行 Kruskal</text:span></text:h>
      <table:table table:name="表格39" table:style-name="表格39">
        <table:table-column table:style-name="表格39.A"/>
        <table:table-column table:style-name="表格39.B"/>
        <table:table-row table:style-name="表格39.1">
          <table:table-cell table:style-name="表格39.A1" table:number-columns-spanned="2" office:value-type="string">
            <text:p text:style-name="P13"><text:span text:style-name="T3">Step 1：加入 (c,e)=2</text:span></text:p>
          </table:table-cell>
          <table:covered-table-cell/>
        </table:table-row>
        <table:table-row table:style-name="表格39.1">
          <table:table-cell table:style-name="表格39.A2" office:value-type="string">
            <text:p text:style-name="P8"><text:span text:style-name="T28">Step 1</text:span></text:p>
          </table:table-cell>
          <table:table-cell table:style-name="表格39.B2" office:value-type="string">
            <text:p text:style-name="P20"><text:span text:style-name="T18">Find(c)=c <text:s text:c="3"/>Find(e)=e <text:s text:c="3"/>← 不同集合，可以加！</text:span></text:p>
            <text:p text:style-name="P20"><text:span text:style-name="T18">Union(c, e)</text:span></text:p>
            <text:p text:style-name="P20"/>
            <text:p text:style-name="P20"><text:span text:style-name="T18">集合狀態：{a} {b} {c,e} {d} {f} {g}</text:span></text:p>
            <text:p text:style-name="P20"><text:span text:style-name="T18">已選邊（1條）：(c,e)=2</text:span></text:p>
            <text:p text:style-name="P20"/>
            <text:p text:style-name="P20"><text:span text:style-name="T18"><text:s text:c="2"/>目前 MST： <text:s/>c──2──e</text:span></text:p>
          </table:table-cell>
        </table:table-row>
      </table:table>
      <text:p text:style-name="P17"/>
      <table:table table:name="表格40" table:style-name="表格40">
        <table:table-column table:style-name="表格40.A"/>
        <table:table-column table:style-name="表格40.B"/>
        <table:table-row table:style-name="表格40.1">
          <table:table-cell table:style-name="表格40.A1" table:number-columns-spanned="2" office:value-type="string">
            <text:p text:style-name="P13"><text:span text:style-name="T3">Step 2：加入 (c,f)=3</text:span></text:p>
          </table:table-cell>
          <table:covered-table-cell/>
        </table:table-row>
        <table:table-row table:style-name="表格40.1">
          <table:table-cell table:style-name="表格40.A2" office:value-type="string">
            <text:p text:style-name="P8"><text:span text:style-name="T28">Step 2</text:span></text:p>
          </table:table-cell>
          <table:table-cell table:style-name="表格40.B2" office:value-type="string">
            <text:p text:style-name="P20"><text:span text:style-name="T18">Find(c)=c <text:s text:c="3"/>Find(f)=f <text:s text:c="3"/>← 不同集合，可以加！</text:span></text:p>
            <text:p text:style-name="P20"><text:span text:style-name="T18">Union(c, f)</text:span></text:p>
            <text:p text:style-name="P20"/>
            <text:p text:style-name="P20"><text:span text:style-name="T18">集合狀態：{a} {b} {c,e,f} {d} {g}</text:span></text:p>
            <text:p text:style-name="P20"><text:span text:style-name="T18">已選邊（2條）：(c,e)=2, (c,f)=3</text:span></text:p>
            <text:p text:style-name="P20"/>
            <text:p text:style-name="P20"><text:span text:style-name="T18"><text:s text:c="2"/>目前 MST： <text:s/>e──2──c──3──f</text:span></text:p>
          </table:table-cell>
        </table:table-row>
      </table:table>
      <text:p text:style-name="P17"/>
      <table:table table:name="表格41" table:style-name="表格41">
        <table:table-column table:style-name="表格41.A"/>
        <table:table-column table:style-name="表格41.B"/>
        <table:table-row table:style-name="表格41.1">
          <table:table-cell table:style-name="表格41.A1" table:number-columns-spanned="2" office:value-type="string">
            <text:p text:style-name="P13"><text:span text:style-name="T3">Step 3：看 (e,f)=4 → ⛔ 跳過！</text:span></text:p>
          </table:table-cell>
          <table:covered-table-cell/>
        </table:table-row>
        <table:table-row table:style-name="表格41.1">
          <table:table-cell table:style-name="表格41.A2" office:value-type="string">
            <text:p text:style-name="P8"><text:span text:style-name="T36">Step 3</text:span></text:p>
          </table:table-cell>
          <table:table-cell table:style-name="表格41.B2" office:value-type="string">
            <text:p text:style-name="P20"><text:span text:style-name="T18">Find(e)=c <text:s text:c="3"/>Find(f)=c <text:s text:c="3"/>← 相同集合！</text:span></text:p>
            <text:p text:style-name="P20"/>
            <text:p text:style-name="P20"><text:span text:style-name="T18">為什麼會同集合？</text:span></text:p>
            <text:p text:style-name="P20"><text:span text:style-name="T18"><text:s text:c="2"/>上面把 c,e 合併成一組，又把 c,f 合併進來，</text:span></text:p>
            <text:p text:style-name="P20"><text:span text:style-name="T18"><text:s text:c="2"/>所以 e、c、f 都在同一組了。</text:span></text:p>
            <text:p text:style-name="P20"/>
            <text:p text:style-name="P20"><text:span text:style-name="T18">若加入 e─f：</text:span></text:p>
            <text:p text:style-name="P20"><text:span text:style-name="T18"><text:s text:c="2"/>e──2──c──3──f</text:span></text:p>
            <text:p text:style-name="P20"><text:span text:style-name="T18"><text:s text:c="2"/>└───────4───┘ <text:s/>← 形成三角形迴路！</text:span></text:p>
            <text:p text:style-name="P20"/>
            <text:p text:style-name="P20"><text:span text:style-name="T18">⛔ 跳過 (e,f)=4</text:span></text:p>
          </table:table-cell>
        </table:table-row>
      </table:table>
      <text:p text:style-name="P17"/>
      <table:table table:name="表格42" table:style-name="表格42">
        <table:table-column table:style-name="表格42.A"/>
        <table:table-column table:style-name="表格42.B"/>
        <text:soft-page-break/>
        <table:table-row table:style-name="表格42.1">
          <table:table-cell table:style-name="表格42.A1" table:number-columns-spanned="2" office:value-type="string">
            <text:p text:style-name="P13"><text:span text:style-name="T3">Step 4：加入 (f,g)=6</text:span></text:p>
          </table:table-cell>
          <table:covered-table-cell/>
        </table:table-row>
        <table:table-row table:style-name="表格42.1">
          <table:table-cell table:style-name="表格42.A2" office:value-type="string">
            <text:p text:style-name="P8"><text:span text:style-name="T28">Step 4</text:span></text:p>
          </table:table-cell>
          <table:table-cell table:style-name="表格42.B2" office:value-type="string">
            <text:p text:style-name="P20"><text:span text:style-name="T18">Find(f)=c <text:s text:c="3"/>Find(g)=g <text:s text:c="3"/>← 不同集合，可以加！</text:span></text:p>
            <text:p text:style-name="P20"><text:span text:style-name="T18">Union(f, g)</text:span></text:p>
            <text:p text:style-name="P20"/>
            <text:p text:style-name="P20"><text:span text:style-name="T18">集合狀態：{a} {b} {c,e,f,g} {d}</text:span></text:p>
            <text:p text:style-name="P20"><text:span text:style-name="T18">已選邊（3條）：(c,e)=2, (c,f)=3, (f,g)=6</text:span></text:p>
            <text:p text:style-name="P20"/>
            <text:p text:style-name="P20"><text:span text:style-name="T18"><text:s text:c="2"/>目前 MST： <text:s/>e──2──c──3──f──6──g</text:span></text:p>
          </table:table-cell>
        </table:table-row>
      </table:table>
      <text:p text:style-name="P17"/>
      <table:table table:name="表格43" table:style-name="表格43">
        <table:table-column table:style-name="表格43.A"/>
        <table:table-column table:style-name="表格43.B"/>
        <table:table-row table:style-name="表格43.1">
          <table:table-cell table:style-name="表格43.A1" table:number-columns-spanned="2" office:value-type="string">
            <text:p text:style-name="P13"><text:span text:style-name="T3">Step 5：加入 (a,c)=9</text:span></text:p>
          </table:table-cell>
          <table:covered-table-cell/>
        </table:table-row>
        <table:table-row table:style-name="表格43.1">
          <table:table-cell table:style-name="表格43.A2" office:value-type="string">
            <text:p text:style-name="P8"><text:span text:style-name="T28">Step 5</text:span></text:p>
          </table:table-cell>
          <table:table-cell table:style-name="表格43.B2" office:value-type="string">
            <text:p text:style-name="P20"><text:span text:style-name="T18">Find(a)=a <text:s text:c="3"/>Find(c)=c <text:s text:c="3"/>← 不同集合，可以加！</text:span></text:p>
            <text:p text:style-name="P20"><text:span text:style-name="T18">Union(a, c)</text:span></text:p>
            <text:p text:style-name="P20"/>
            <text:p text:style-name="P20"><text:span text:style-name="T18">集合狀態：{a,c,e,f,g} {b} {d}</text:span></text:p>
            <text:p text:style-name="P20"><text:span text:style-name="T18">已選邊（4條）：...+(a,c)=9</text:span></text:p>
            <text:p text:style-name="P20"/>
            <text:p text:style-name="P20"><text:span text:style-name="T18"><text:s text:c="2"/>目前 MST：</text:span></text:p>
            <text:p text:style-name="P20"><text:span text:style-name="T18"><text:s text:c="4"/>a──9──c──3──f──6──g</text:span></text:p>
            <text:p text:style-name="P20"><text:span text:style-name="T18"><text:s text:c="11"/>│</text:span></text:p>
            <text:p text:style-name="P20"><text:span text:style-name="T18"><text:s text:c="11"/>2</text:span></text:p>
            <text:p text:style-name="P20"><text:span text:style-name="T18"><text:s text:c="11"/>│</text:span></text:p>
            <text:p text:style-name="P20"><text:span text:style-name="T18"><text:s text:c="11"/>e</text:span></text:p>
          </table:table-cell>
        </table:table-row>
      </table:table>
      <text:p text:style-name="P17"/>
      <table:table table:name="表格44" table:style-name="表格44">
        <table:table-column table:style-name="表格44.A"/>
        <table:table-column table:style-name="表格44.B"/>
        <table:table-row table:style-name="表格44.1">
          <table:table-cell table:style-name="表格44.A1" table:number-columns-spanned="2" office:value-type="string">
            <text:p text:style-name="P13"><text:span text:style-name="T3">Step 6：加入 (a,d)=10</text:span></text:p>
          </table:table-cell>
          <table:covered-table-cell/>
        </table:table-row>
        <table:table-row table:style-name="表格44.1">
          <table:table-cell table:style-name="表格44.A2" office:value-type="string">
            <text:p text:style-name="P8"><text:span text:style-name="T28">Step 6</text:span></text:p>
          </table:table-cell>
          <table:table-cell table:style-name="表格44.B2" office:value-type="string">
            <text:p text:style-name="P20"><text:span text:style-name="T18">Find(a)=a <text:s text:c="3"/>Find(d)=d <text:s text:c="3"/>← 不同集合，可以加！</text:span></text:p>
            <text:p text:style-name="P20"><text:span text:style-name="T18">Union(a, d)</text:span></text:p>
            <text:p text:style-name="P20"/>
            <text:p text:style-name="P20"><text:span text:style-name="T18">集合狀態：{a,c,d,e,f,g} {b}</text:span></text:p>
            <text:p text:style-name="P20"><text:span text:style-name="T18">已選邊（5條）：...+(a,d)=10</text:span></text:p>
            <text:p text:style-name="P20"/>
            <text:p text:style-name="P20"><text:span text:style-name="T18"><text:s text:c="2"/>目前 MST：</text:span></text:p>
            <text:p text:style-name="P20"><text:span text:style-name="T18"><text:s text:c="4"/>d──10──a──9──c──3──f──6──g</text:span></text:p>
            <text:p text:style-name="P20"><text:span text:style-name="T18"><text:s text:c="18"/>│</text:span></text:p>
            <text:p text:style-name="P20"><text:span text:style-name="T18"><text:s text:c="18"/>2</text:span></text:p>
            <text:p text:style-name="P20"><text:span text:style-name="T18"><text:s text:c="18"/>│</text:span></text:p>
            <text:p text:style-name="P20"><text:span text:style-name="T18"><text:s text:c="18"/>e</text:span></text:p>
          </table:table-cell>
        </table:table-row>
      </table:table>
      <text:p text:style-name="P17"/>
      <table:table table:name="表格45" table:style-name="表格45">
        <table:table-column table:style-name="表格45.A"/>
        <table:table-column table:style-name="表格45.B"/>
        <table:table-row table:style-name="表格45.1">
          <table:table-cell table:style-name="表格45.A1" table:number-columns-spanned="2" office:value-type="string">
            <text:p text:style-name="P13"><text:span text:style-name="T3">Step 7：看 (c,d)=12 → ⛔ 跳過！</text:span></text:p>
          </table:table-cell>
          <table:covered-table-cell/>
        </table:table-row>
        <table:table-row table:style-name="表格45.1">
          <table:table-cell table:style-name="表格45.A2" office:value-type="string">
            <text:p text:style-name="P8"><text:span text:style-name="T36">Step 7</text:span></text:p>
          </table:table-cell>
          <table:table-cell table:style-name="表格45.B2" office:value-type="string">
            <text:p text:style-name="P20"><text:span text:style-name="T18">Find(c)=a <text:s text:c="3"/>Find(d)=a <text:s text:c="3"/>← 相同集合！</text:span></text:p>
            <text:p text:style-name="P20"/>
            <text:p text:style-name="P20"><text:span text:style-name="T18">為什麼？</text:span></text:p>
            <text:p text:style-name="P20"><text:span text:style-name="T18"><text:s text:c="2"/>步驟5：a 和 c 合併 → {a,c,...}</text:span></text:p>
            <text:p text:style-name="P20"><text:span text:style-name="T18"><text:s text:c="2"/>步驟6：a 和 d 合併 → {a,c,d,...}</text:span></text:p>
            <text:p text:style-name="P20"><text:span text:style-name="T18"><text:s text:c="2"/>現在 c 和 d 都在同一組了！</text:span></text:p>
            <text:p text:style-name="P20"/>
            <text:p text:style-name="P20"><text:span text:style-name="T18">若加入 c─d：c─a─d─c 形成三角形迴路！</text:span></text:p>
            <text:p text:style-name="P20"><text:soft-page-break/></text:p>
            <text:p text:style-name="P20"><text:span text:style-name="T18">⛔ 跳過 (c,d)=12</text:span></text:p>
          </table:table-cell>
        </table:table-row>
      </table:table>
      <text:p text:style-name="P17"/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table:number-columns-spanned="2" office:value-type="string">
            <text:p text:style-name="P13"><text:span text:style-name="T3">Step 8：加入 (a,b)=13 ← 最後一條！</text:span></text:p>
          </table:table-cell>
          <table:covered-table-cell/>
        </table:table-row>
        <table:table-row table:style-name="表格46.1">
          <table:table-cell table:style-name="表格46.A2" office:value-type="string">
            <text:p text:style-name="P8"><text:span text:style-name="T22">Step 8</text:span></text:p>
          </table:table-cell>
          <table:table-cell table:style-name="表格46.B2" office:value-type="string">
            <text:p text:style-name="P20"><text:span text:style-name="T18">Find(a)=a <text:s text:c="3"/>Find(b)=b <text:s text:c="3"/>← 不同集合，可以加！</text:span></text:p>
            <text:p text:style-name="P20"><text:span text:style-name="T18">Union(a, b)</text:span></text:p>
            <text:p text:style-name="P20"/>
            <text:p text:style-name="P20"><text:span text:style-name="T18">集合狀態：{a,b,c,d,e,f,g} <text:s/>← 所有節點都在同一組！</text:span></text:p>
            <text:p text:style-name="P20"><text:span text:style-name="T18">已選邊（6條）= V-1 = 7-1 = 6 <text:s/>✅ <text:s/>完成！</text:span></text:p>
            <text:p text:style-name="P20"/>
            <text:p text:style-name="P20"><text:span text:style-name="T18"><text:s text:c="2"/>最終 MST：</text:span></text:p>
            <text:p text:style-name="P20"><text:span text:style-name="T18"><text:s text:c="4"/>b──13──a──9──c──3──f──6──g</text:span></text:p>
            <text:p text:style-name="P20"><text:span text:style-name="T18"><text:s text:c="12"/>│ <text:s text:c="3"/>│</text:span></text:p>
            <text:p text:style-name="P20"><text:span text:style-name="T18"><text:s text:c="11"/>10 <text:s text:c="3"/>2</text:span></text:p>
            <text:p text:style-name="P20"><text:span text:style-name="T18"><text:s text:c="12"/>│ <text:s text:c="3"/>│</text:span></text:p>
            <text:p text:style-name="P20"><text:span text:style-name="T18"><text:s text:c="12"/>d <text:s text:c="3"/>e</text:span></text:p>
          </table:table-cell>
        </table:table-row>
      </table:table>
      <text:p text:style-name="P15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13"><text:span text:style-name="T33">✅ 最終答案</text:span></text:p>
            <text:p text:style-name="P17"/>
            <text:p text:style-name="P13"><text:span text:style-name="T13">MST 邊集合：</text:span><text:span text:style-name="T12">(c,e)=2, (c,f)=3, (f,g)=6, (a,c)=9, (a,d)=10, (a,b)=13</text:span></text:p>
            <text:p text:style-name="P13"><text:span text:style-name="T13">總權重：</text:span><text:span text:style-name="T12">2 + 3 + 6 + 9 + 10 + 13 = </text:span><text:span text:style-name="T37">43</text:span></text:p>
            <text:p text:style-name="P13"><text:span text:style-name="T13">邊數驗證：</text:span><text:span text:style-name="T12">V-1 = 7-1 = 6 條 <text:s/>✅</text:span></text:p>
            <text:p text:style-name="P17"/>
            <text:p text:style-name="P13"><text:span text:style-name="T38">跳過原因整理：</text:span></text:p>
            <text:p text:style-name="P13"><text:span text:style-name="T12"><text:s text:c="2"/>(e,f)=4 → c、e、f 已同集合，加了 e─c─f─e 成三角形</text:span></text:p>
            <text:p text:style-name="P13"><text:span text:style-name="T12"><text:s text:c="2"/>(c,d)=12 → c、d 已透過 a 相連，加了 c─a─d─c 成三角形</text:span></text:p>
          </table:table-cell>
        </table:table-row>
      </table:table>
      <text:h text:style-name="P2" text:outline-level="1"><text:span text:style-name="T8">七、考試速查卡 ── 最終背誦版</text:span></text:h>
      <text:p text:style-name="P19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3"><text:span text:style-name="T22">⭐ Prim 三句口訣</text:span></text:p>
            <text:p text:style-name="P13"><text:span text:style-name="T12">① 從任一節點出發，每次選「T 內 → T 外」最小邊。</text:span></text:p>
            <text:p text:style-name="P13"><text:span text:style-name="T12">② 天然防止 Cycle，不需 Union-Find，也不需額外判斷。</text:span></text:p>
            <text:p text:style-name="P13"><text:span text:style-name="T12">③ 矩陣版 O(V²)；Heap 版 O(E log V)。稠密圖用矩陣版更省。</text:span></text:p>
          </table:table-cell>
        </table:table-row>
      </table:table>
      <text:p text:style-name="P19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13"><text:span text:style-name="T28">⭐ Kruskal 三句口訣</text:span></text:p>
            <text:p text:style-name="P13"><text:span text:style-name="T12">① 所有邊排序（小→大），Union-Find 逐一判斷是否成環。</text:span></text:p>
            <text:p text:style-name="P13"><text:span text:style-name="T12">② 同集合 → 跳過；不同集合 → 加入、合併。</text:span></text:p>
            <text:p text:style-name="P13"><text:span text:style-name="T12">③ 時間複雜度 O(E log E)，稀疏圖（邊少）時效率最好。</text:span></text:p>
          </table:table-cell>
        </table:table-row>
      </table:table>
      <text:p text:style-name="P19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3"><text:span text:style-name="T30">⭐ Sollin 三句口訣</text:span></text:p>
            <text:p text:style-name="P13"><text:soft-page-break/><text:span text:style-name="T12">① 每個 Component 同時找自己最短外連邊，全體同時合併。</text:span></text:p>
            <text:p text:style-name="P13"><text:span text:style-name="T12">② 每輪至少合併一半，最多 log V 輪結束。</text:span></text:p>
            <text:p text:style-name="P13"><text:span text:style-name="T12">③ 適合平行 / 分散式計算，時間複雜度 O(E log V)。</text:span></text:p>
          </table:table-cell>
        </table:table-row>
      </table:table>
      <text:p text:style-name="P19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13"><text:span text:style-name="T10">⭐ MST 必背特性</text:span></text:p>
            <text:p text:style-name="P13"><text:span text:style-name="T12">① V-1 條邊：少一條有孤立點；多一條必有迴路。</text:span></text:p>
            <text:p text:style-name="P13"><text:span text:style-name="T12">② 無 Cycle：有環必有冗餘邊，去掉更輕。</text:span></text:p>
            <text:p text:style-name="P13"><text:span text:style-name="T12">③ 連通圖才有 MST；不連通 → 最小擴張森林。</text:span></text:p>
            <text:p text:style-name="P13"><text:span text:style-name="T12">④ Cut Property：任意把圖切成兩半，跨切割的最小邊必屬某棵 MST。</text:span></text:p>
          </table:table-cell>
        </table:table-row>
      </table:table>
      <text:p text:style-name="P15"/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B"/>
        <table:table-column table:style-name="表格52.E"/>
        <table:table-row table:style-name="表格52.1">
          <table:table-cell table:style-name="表格52.A1" office:value-type="string">
            <text:p text:style-name="P8"><text:span text:style-name="T2">演算法</text:span></text:p>
          </table:table-cell>
          <table:table-cell table:style-name="表格52.B1" office:value-type="string">
            <text:p text:style-name="P8"><text:span text:style-name="T2">出發點</text:span></text:p>
          </table:table-cell>
          <table:table-cell table:style-name="表格52.C1" office:value-type="string">
            <text:p text:style-name="P8"><text:span text:style-name="T2">核心操作</text:span></text:p>
          </table:table-cell>
          <table:table-cell table:style-name="表格52.D1" office:value-type="string">
            <text:p text:style-name="P8"><text:span text:style-name="T2">時間複雜度</text:span></text:p>
          </table:table-cell>
          <table:table-cell table:style-name="表格52.E1" office:value-type="string">
            <text:p text:style-name="P8"><text:span text:style-name="T2">適合圖型</text:span></text:p>
          </table:table-cell>
        </table:table-row>
        <table:table-row table:style-name="表格52.1">
          <table:table-cell table:style-name="表格52.A2" office:value-type="string">
            <text:p text:style-name="P14"><text:span text:style-name="T14">Prim</text:span></text:p>
          </table:table-cell>
          <table:table-cell table:style-name="表格52.B2" office:value-type="string">
            <text:p text:style-name="P14"><text:span text:style-name="T15">任一節點</text:span></text:p>
          </table:table-cell>
          <table:table-cell table:style-name="表格52.C2" office:value-type="string">
            <text:p text:style-name="P14"><text:span text:style-name="T15">T內→T外，選最小邊</text:span></text:p>
          </table:table-cell>
          <table:table-cell table:style-name="表格52.D2" office:value-type="string">
            <text:p text:style-name="P14"><text:span text:style-name="T15">O(V²) / O(ElogV)</text:span></text:p>
          </table:table-cell>
          <table:table-cell table:style-name="表格52.E2" office:value-type="string">
            <text:p text:style-name="P14"><text:span text:style-name="T15">稠密圖</text:span></text:p>
          </table:table-cell>
        </table:table-row>
        <table:table-row table:style-name="表格52.1">
          <table:table-cell table:style-name="表格52.A3" office:value-type="string">
            <text:p text:style-name="P14"><text:span text:style-name="T14">Kruskal</text:span></text:p>
          </table:table-cell>
          <table:table-cell table:style-name="表格52.B3" office:value-type="string">
            <text:p text:style-name="P14"><text:span text:style-name="T15">最小邊</text:span></text:p>
          </table:table-cell>
          <table:table-cell table:style-name="表格52.C3" office:value-type="string">
            <text:p text:style-name="P14"><text:span text:style-name="T15">邊排序+Union-Find</text:span></text:p>
          </table:table-cell>
          <table:table-cell table:style-name="表格52.D3" office:value-type="string">
            <text:p text:style-name="P14"><text:span text:style-name="T15">O(E log E)</text:span></text:p>
          </table:table-cell>
          <table:table-cell table:style-name="表格52.E3" office:value-type="string">
            <text:p text:style-name="P14"><text:span text:style-name="T15">稀疏圖</text:span></text:p>
          </table:table-cell>
        </table:table-row>
        <table:table-row table:style-name="表格52.1">
          <table:table-cell table:style-name="表格52.A4" office:value-type="string">
            <text:p text:style-name="P14"><text:span text:style-name="T14">Sollin</text:span></text:p>
          </table:table-cell>
          <table:table-cell table:style-name="表格52.B4" office:value-type="string">
            <text:p text:style-name="P14"><text:span text:style-name="T15">所有節點同時</text:span></text:p>
          </table:table-cell>
          <table:table-cell table:style-name="表格52.C4" office:value-type="string">
            <text:p text:style-name="P14"><text:span text:style-name="T15">各Component找最短外連邊</text:span></text:p>
          </table:table-cell>
          <table:table-cell table:style-name="表格52.D4" office:value-type="string">
            <text:p text:style-name="P14"><text:span text:style-name="T15">O(E log V)</text:span></text:p>
          </table:table-cell>
          <table:table-cell table:style-name="表格52.E4" office:value-type="string">
            <text:p text:style-name="P14"><text:span text:style-name="T15">平行/分散式</text:span></text:p>
          </table:table-cell>
        </table:table-row>
      </table:table>
      <text:p text:style-name="P15"/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3"><text:span text:style-name="T31">113閩Q5 快速記憶</text:span></text:p>
            <text:p text:style-name="P17"/>
            <text:p text:style-name="P13"><text:span text:style-name="T38">跳過：</text:span><text:span text:style-name="T12">(e,f)=4 → c,e,f 同集合 <text:s text:c="3"/>(c,d)=12 → c,d 已透過 a 相連</text:span></text:p>
            <text:p text:style-name="P13"><text:span text:style-name="T34">MST：</text:span><text:span text:style-name="T12">ce=2 + cf=3 + fg=6 + ac=9 + ad=10 + ab=13 = </text:span><text:span text:style-name="T39">43</text:span></text:p>
          </table:table-cell>
        </table:table-row>
      </table:table>
      <text:p text:style-name="P11"/>
      <text:p text:style-name="P23"/>
      <text:p text:style-name="P9"><text:span text:style-name="T25">本筆記包含：名詞解釋 × 完整圖解 × 逐步推導 × Python程式實作 × 公職真題113閩Q5</text:span></text:p>
      <text:p text:style-name="P10"><text:span text:style-name="T25">最小擴張樹 MST 完整考試筆記 <text:s/>v3.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1c1c1c" loext:opacity="10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1c1c1c" loext:opacity="10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cm" fo:margin-bottom="0.212cm" style:contextual-spacing="false"/>
      <style:text-properties fo:color="#1f4e79" loext:opacity="100%" style:font-name="Arial2" fo:font-family="Arial" style:font-family-generic="swiss" style:font-pitch="variable" fo:font-size="17pt" fo:font-weight="bold" style:font-name-asian="Arial3" style:font-family-asian="Arial" style:font-family-generic-asian="system" style:font-pitch-asian="variable" style:font-size-asian="17pt" style:font-weight-asian="bold" style:font-name-complex="Arial3" style:font-family-complex="Arial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88cm" fo:margin-bottom="0.141cm" style:contextual-spacing="false"/>
      <style:text-properties fo:color="#2e75b6" loext:opacity="100%" style:font-name="Arial2" fo:font-family="Arial" style:font-family-generic="swiss" style:font-pitch="variable" fo:font-size="13.5pt" fo:font-weight="bold" style:font-name-asian="Arial3" style:font-family-asian="Arial" style:font-family-generic-asian="system" style:font-pitch-asian="variable" style:font-size-asian="13.5pt" style:font-weight-asian="bold" style:font-name-complex="Arial3" style:font-family-complex="Arial" style:font-family-generic-complex="system" style:font-pitch-complex="variable" style:font-size-complex="13.5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dc:creator>Un-named</dc:creator>
    <meta:editing-cycles>1</meta:editing-cycles>
    <meta:creation-date>2026-06-05T02:51:49.036000000</meta:creation-date>
    <dc:date>2026-06-05T02:51:49.036000000</dc:date>
    <meta:document-statistic meta:table-count="53" meta:image-count="0" meta:object-count="0" meta:page-count="18" meta:paragraph-count="649" meta:word-count="6708" meta:character-count="17252" meta:non-whitespace-character-count="12131"/>
    <meta:generator>MODA_ODF_Application_Tools/3.8.4.2$Windows_X86_64 LibreOffice_project/4fb77107d5af14329e08085efe4fa19b5633383a</meta:generator>
  </office:meta>
</office:document-meta>
</file>