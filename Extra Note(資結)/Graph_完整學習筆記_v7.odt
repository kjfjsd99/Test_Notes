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9cm"/>
    </style:style>
    <style:style style:name="表格44.B" style:family="table-column">
      <style:table-column-properties style:column-width="5.8cm"/>
    </style:style>
    <style:style style:name="表格44.C" style:family="table-column">
      <style:table-column-properties style:column-width="3.9cm"/>
    </style:style>
    <style:style style:name="表格44.D" style:family="table-column">
      <style:table-column-properties style:column-width="3.3cm"/>
    </style:style>
    <style:style style:name="表格44.E" style:family="table-column">
      <style:table-column-properties style:column-width="3.29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aea" fo:padding-left="0.353cm" fo:padding-right="0.353cm" fo:padding-top="0.053cm" fo:padding-bottom="0.053cm" fo:border="0.25pt solid #bbbbbb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3e0" fo:padding-left="0.353cm" fo:padding-right="0.353cm" fo:padding-top="0.053cm" fo:padding-bottom="0.053cm" fo:border="0.25pt solid #bbbbbb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6f0de" fo:padding-left="0.353cm" fo:padding-right="0.353cm" fo:padding-top="0.053cm" fo:padding-bottom="0.053cm" fo:border="0.25pt solid #bbbbbb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f0de" fo:padding-left="0.353cm" fo:padding-right="0.353cm" fo:padding-top="0.053cm" fo:padding-bottom="0.053cm" fo:border="0.25pt solid #bbbbbb">
        <style:background-image/>
      </style:table-cell-properties>
    </style:style>
    <style:style style:name="表格48_5f_1" style:display-name="表格48_1" style:family="table">
      <style:table-properties style:width="17.191cm" fo:margin-left="0.004cm" fo:margin-top="0cm" fo:margin-bottom="0cm" table:align="left" style:writing-mode="page"/>
    </style:style>
    <style:style style:name="表格48_5f_1.A" style:display-name="表格48_1.A" style:family="table-column">
      <style:table-column-properties style:column-width="17.191cm"/>
    </style:style>
    <style:style style:name="表格48_5f_1.1" style:display-name="表格48_1.1" style:family="table-row">
      <style:table-row-properties fo:keep-together="auto"/>
    </style:style>
    <style:style style:name="表格48_5f_1.A1" style:display-name="表格48_1.A1" style:family="table-cell">
      <style:table-cell-properties fo:background-color="#fdeaea" fo:padding-left="0.353cm" fo:padding-right="0.353cm" fo:padding-top="0.053cm" fo:padding-bottom="0.053cm" fo:border="0.25pt solid #bbbbbb">
        <style:background-image/>
      </style:table-cell-properties>
    </style:style>
    <style:style style:name="表格47_5f_1" style:display-name="表格47_1" style:family="table">
      <style:table-properties style:width="17.191cm" fo:margin-left="0.004cm" fo:margin-top="0cm" fo:margin-bottom="0cm" table:align="left" style:writing-mode="page"/>
    </style:style>
    <style:style style:name="表格47_5f_1.A" style:display-name="表格47_1.A" style:family="table-column">
      <style:table-column-properties style:column-width="17.191cm"/>
    </style:style>
    <style:style style:name="表格47_5f_1.1" style:display-name="表格47_1.1" style:family="table-row">
      <style:table-row-properties fo:keep-together="auto"/>
    </style:style>
    <style:style style:name="表格47_5f_1.A1" style:display-name="表格47_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_5f_1" style:display-name="表格51_1" style:family="table">
      <style:table-properties style:width="17.191cm" fo:margin-left="0.004cm" fo:margin-top="0cm" fo:margin-bottom="0cm" table:align="left" style:writing-mode="page"/>
    </style:style>
    <style:style style:name="表格51_5f_1.A" style:display-name="表格51_1.A" style:family="table-column">
      <style:table-column-properties style:column-width="17.191cm"/>
    </style:style>
    <style:style style:name="表格51_5f_1.1" style:display-name="表格51_1.1" style:family="table-row">
      <style:table-row-properties fo:keep-together="auto"/>
    </style:style>
    <style:style style:name="表格51_5f_1.A1" style:display-name="表格51_1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43_5f_1" style:display-name="表格43_1" style:family="table">
      <style:table-properties style:width="17.191cm" fo:margin-left="0.004cm" fo:margin-top="0cm" fo:margin-bottom="0cm" table:align="left" style:writing-mode="page"/>
    </style:style>
    <style:style style:name="表格43_5f_1.A" style:display-name="表格43_1.A" style:family="table-column">
      <style:table-column-properties style:column-width="17.191cm"/>
    </style:style>
    <style:style style:name="表格43_5f_1.1" style:display-name="表格43_1.1" style:family="table-row">
      <style:table-row-properties fo:keep-together="auto"/>
    </style:style>
    <style:style style:name="表格43_5f_1.A1" style:display-name="表格43_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5_5f_1" style:display-name="表格45_1" style:family="table">
      <style:table-properties style:width="17.191cm" fo:margin-left="0.004cm" fo:margin-top="0cm" fo:margin-bottom="0cm" table:align="left" style:writing-mode="page"/>
    </style:style>
    <style:style style:name="表格45_5f_1.A" style:display-name="表格45_1.A" style:family="table-column">
      <style:table-column-properties style:column-width="17.191cm"/>
    </style:style>
    <style:style style:name="表格45_5f_1.1" style:display-name="表格45_1.1" style:family="table-row">
      <style:table-row-properties fo:keep-together="auto"/>
    </style:style>
    <style:style style:name="表格45_5f_1.A1" style:display-name="表格45_1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46_5f_1" style:display-name="表格46_1" style:family="table">
      <style:table-properties style:width="17.191cm" fo:margin-left="0.004cm" fo:margin-top="0cm" fo:margin-bottom="0cm" table:align="left" style:writing-mode="page"/>
    </style:style>
    <style:style style:name="表格46_5f_1.A" style:display-name="表格46_1.A" style:family="table-column">
      <style:table-column-properties style:column-width="17.191cm"/>
    </style:style>
    <style:style style:name="表格46_5f_1.1" style:display-name="表格46_1.1" style:family="table-row">
      <style:table-row-properties fo:keep-together="auto"/>
    </style:style>
    <style:style style:name="表格46_5f_1.A1" style:display-name="表格46_1.A1" style:family="table-cell">
      <style:table-cell-properties fo:background-color="#d6f0de" fo:padding-left="0.353cm" fo:padding-right="0.353cm" fo:padding-top="0.053cm" fo:padding-bottom="0.053cm" fo:border="0.25pt solid #bbbbbb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5" style:family="paragraph" style:parent-style-name="Standard">
      <style:paragraph-properties fo:margin-top="0.071cm" fo:margin-bottom="0.071cm" style:contextual-spacing="false"/>
    </style:style>
    <style:style style:name="P6" style:family="paragraph" style:parent-style-name="Standard">
      <style:paragraph-properties fo:margin-top="0.088cm" fo:margin-bottom="0cm" style:contextual-spacing="false"/>
    </style:style>
    <style:style style:name="P7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fo:text-align="left" style:justify-single-word="false"/>
    </style:style>
    <style:style style:name="P10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4" style:family="paragraph" style:parent-style-name="Standard">
      <style:paragraph-properties fo:margin-top="0.212cm" fo:margin-bottom="0.071cm" style:contextual-spacing="false"/>
    </style:style>
    <style:style style:name="P15" style:family="paragraph" style:parent-style-name="Standard">
      <style:paragraph-properties fo:margin-top="0.106cm" fo:margin-bottom="0.106cm" style:contextual-spacing="false"/>
    </style:style>
    <style:style style:name="P16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17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18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19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0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officeooo:paragraph-rsid="0043cb14"/>
    </style:style>
    <style:style style:name="P23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24" style:family="paragraph" style:parent-style-name="Standard">
      <style:text-properties fo:color="#eeeeee" loext:opacity="100%" officeooo:paragraph-rsid="0043cb14"/>
    </style:style>
    <style:style style:name="P25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26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27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28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30" style:family="paragraph" style:parent-style-name="Standard">
      <style:paragraph-properties fo:margin-top="0cm" fo:margin-bottom="0.106cm" style:contextual-spacing="fals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18ffff" loext:opacity="100%" fo:background-color="#d500f9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ff3d00" loext:opacity="100%" fo:background-color="#64ffda"/>
    </style:style>
    <style:style style:name="P33" style:family="paragraph" style:parent-style-name="Standard">
      <style:paragraph-properties fo:margin-top="0cm" fo:margin-bottom="0cm" style:contextual-spacing="false"/>
      <style:text-properties fo:color="#ffff00" loext:opacity="100%" fo:font-weight="bold" style:font-weight-asian="bold" style:font-weight-complex="bold"/>
    </style:style>
    <style:style style:name="P34" style:family="paragraph" style:parent-style-name="Heading_20_1">
      <style:paragraph-properties fo:margin-left="0cm" fo:margin-right="0cm" fo:margin-top="0.564cm" fo:margin-bottom="0.212cm" style:contextual-spacing="false" fo:text-indent="0cm" style:auto-text-indent="false" fo:break-before="page"/>
    </style:style>
    <style:style style:name="P35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6" style:family="paragraph" style:parent-style-name="Standard">
      <style:paragraph-properties fo:margin-top="0.318cm" fo:margin-bottom="0.106cm" style:contextual-spacing="false"/>
    </style:style>
    <style:style style:name="P37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38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T1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4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5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6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7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8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9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11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4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5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17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18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19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1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2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25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26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27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28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9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30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31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2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33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34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36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3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38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39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1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2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3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4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5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6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47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8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55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6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7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8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9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0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1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3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4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5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6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7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8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0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1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2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3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4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5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9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80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81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82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3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4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85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6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7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88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89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90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1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2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93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4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5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6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font-weight="bold" fo:background-color="#ffd74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9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00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01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2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03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ff6e4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64ffda" loext:opacity="100%"/>
    </style:style>
    <style:style style:name="T106" style:family="text">
      <style:text-properties fo:color="#ffd740" loext:opacity="100%"/>
    </style:style>
    <style:style style:name="T107" style:family="text">
      <style:text-properties fo:color="#2979ff" loext:opacity="100%"/>
    </style:style>
    <style:style style:name="T108" style:family="text">
      <style:text-properties fo:color="#ffff00" loext:opacity="100%"/>
    </style:style>
    <style:style style:name="T109" style:family="text">
      <style:text-properties fo:background-color="#ffff00" loext:char-shading-value="0"/>
    </style:style>
    <style:style style:name="T110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11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12" style:family="text">
      <style:text-properties fo:font-weight="bold" fo:background-color="#ff4081" loext:char-shading-value="0" style:font-weight-asian="bold" style:font-weight-complex="bold"/>
    </style:style>
    <style:style style:name="T113" style:family="text">
      <style:text-properties fo:font-weight="bold" fo:background-color="#76ff03" loext:char-shading-value="0" style:font-weight-asian="bold" style:font-weight-complex="bold"/>
    </style:style>
    <style:style style:name="T114" style:family="text">
      <style:text-properties fo:font-weight="bold" fo:background-color="#ffff00" loext:char-shading-value="0" style:font-weight-asian="bold" style:font-weight-complex="bold"/>
    </style:style>
    <style:style style:name="T1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7" style:family="text">
      <style:text-properties fo:color="#76ff03" loext:opacity="100%" fo:background-color="#3d5afe" loext:char-shading-value="0"/>
    </style:style>
    <style:style style:name="T118" style:family="text">
      <style:text-properties fo:color="#18ffff" loext:opacity="100%" fo:background-color="#d500f9" loext:char-shading-value="0"/>
    </style:style>
    <style:style style:name="T11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121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22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3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124" style:family="text">
      <style:text-properties fo:color="#ff6e40" loext:opacity="100%" fo:font-weight="bold" fo:background-color="#64ffda" loext:char-shading-value="0" style:font-weight-asian="bold" style:font-weight-complex="bold"/>
    </style:style>
    <style:style style:name="T125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26" style:family="text">
      <style:text-properties fo:color="#00e676" loext:opacity="100%" style:font-name="Courier New" fo:font-size="9pt" fo:font-weight="bold" fo:background-color="#e040fb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7" style:family="text">
      <style:text-properties fo:color="#404040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8" style:family="text">
      <style:text-properties fo:color="#18ffff" loext:opacity="100%" fo:font-size="10pt" fo:font-weight="bold" fo:background-color="#000000" loext:char-shading-value="0" style:font-name-asian="Arial2" style:font-size-asian="10pt" style:font-weight-asian="bold" style:font-name-complex="Arial2" style:font-size-complex="10pt" style:font-weight-complex="bold"/>
    </style:style>
    <style:style style:name="T129" style:family="text">
      <style:text-properties fo:color="#18ffff" loext:opacity="100%" style:font-name="Arial" fo:font-size="10pt" fo:font-weight="bold" fo:background-color="#000000" loext:char-shading-value="0" style:font-size-asian="10pt" style:font-weight-asian="bold" style:font-name-complex="Arial2" style:font-size-complex="10pt" style:font-weight-complex="bold"/>
    </style:style>
    <style:style style:name="T130" style:family="text">
      <style:text-properties fo:color="#ffff00" loext:opacity="100%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32" style:family="text">
      <style:text-properties fo:color="#ffff00" loext:opacity="100%" style:font-name="Courier New" fo:font-size="10pt" fo:font-weight="bold" fo:background-color="#ff91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33" style:family="text">
      <style:text-properties fo:color="#000000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000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5" style:family="text">
      <style:text-properties fo:color="#18ffff" loext:opacity="100%" fo:font-size="9.5pt" fo:font-weight="bold" fo:background-color="#e040fb" loext:char-shading-value="0" style:font-name-asian="Arial2" style:font-size-asian="9.5pt" style:font-weight-asian="bold" style:font-name-complex="Arial2" style:font-size-complex="9.5pt" style:font-weight-complex="bold"/>
    </style:style>
    <style:style style:name="T136" style:family="text">
      <style:text-properties fo:color="#00e676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7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8" style:family="text">
      <style:text-properties fo:color="#ffd740" loext:opacity="100%" style:font-name="Courier New" fo:font-size="9pt" fo:font-weight="bold" fo:background-color="#ff525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9" style:family="text">
      <style:text-properties fo:color="#18ffff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0" style:family="text">
      <style:text-properties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1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42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3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4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5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6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7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8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9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0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1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3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55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156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圖形 </text:span><text:span text:style-name="T3">(Graph) </text:span><text:span text:style-name="T2">完整學習筆記</text:span></text:p>
      <text:p text:style-name="P2" loext:marker-style-name="T4"><text:span text:style-name="T5">BFS · DFS · Topological Sort · Prim MST · Adjacency Multilist</text:span><text:span text:style-name="T4"/></text:p>
      <text:p text:style-name="P3" loext:marker-style-name="T6"><text:span text:style-name="T7">含完整圖解 </text:span><text:span text:style-name="T8">· </text:span><text:span text:style-name="T7">演算法逐步追蹤 </text:span><text:span text:style-name="T8">· </text:span><text:span text:style-name="T7">時間</text:span><text:span text:style-name="T8">/</text:span><text:span text:style-name="T7">空間複雜度推導 </text:span><text:span text:style-name="T8">· </text:span><text:span text:style-name="T7">考試申論題</text:span></text:p>
      <text:p text:style-name="Standard"/>
      <text:h text:style-name="P4" text:outline-level="1" loext:marker-style-name="T9"><text:span text:style-name="T10">一、</text:span><text:span text:style-name="T9">Graph</text:span><text:span text:style-name="T10">（圖）基本概念與圖示</text:span></text:h>
      <text:p text:style-name="P5" loext:marker-style-name="T11"><text:span text:style-name="T12">Graph = </text:span><text:span text:style-name="T13">頂點（</text:span><text:span text:style-name="T12">Vertex</text:span><text:span text:style-name="T13">）</text:span><text:span text:style-name="T12">+ </text:span><text:span text:style-name="T13">邊（</text:span><text:span text:style-name="T12">Edge</text:span><text:span text:style-name="T13">）的集合，用來表示元素之間的關係。</text:span></text:p>
      <text:p text:style-name="P6"/>
      <text:p text:style-name="P7" loext:marker-style-name="T14"><text:span text:style-name="T15"><text:s text:c="2"/>▎ </text:span><text:span text:style-name="T16">無向圖（</text:span><text:span text:style-name="T17">Undirected Graph</text:span><text:span text:style-name="T1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 loext:marker-style-name="T18"><text:span text:style-name="T18"><text:s text:c="7"/>A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6"/>/ \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5"/>/ <text:s text:c="2"/>\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B-----C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|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頂點（Vertex）：A B C 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邊 <text:s/>（Edge） <text:s/>：A-B <text:s/>A-C <text:s/>B-C <text:s/>B-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</text:span><text:span text:style-name="T19">B 的 Degree <text:s text:c="2"/>= 3</text:span><text:span text:style-name="T18">（連到 A、C、D）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有向圖（</text:span><text:span text:style-name="T17">Directed Graph</text:span><text:span text:style-name="T16">）與 </text:span><text:span text:style-name="T15">DAG </text:span><text:span text:style-name="T1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 loext:marker-style-name="T18"><text:span text:style-name="T18"><text:s text:c="7"/>A ──→ B ──→ D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│ <text:s text:c="8"/>↗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↓ <text:s text:c="6"/>╱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C ────╱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A→B <text:s/>A→C <text:s/>B→D <text:s/>C→D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</text:span><text:span text:style-name="T20">in-degree(A)=0</text:span><text:span text:style-name="T18"> <text:s/></text:span><text:span text:style-name="T20">in-degree(B)=1</text:span><text:span text:style-name="T18"> <text:s/></text:span><text:span text:style-name="T20">in-degree(C)=1</text:span><text:span text:style-name="T18"> <text:s/></text:span><text:span text:style-name="T20">in-degree(D)=2</text:span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此圖無 Cycle → 是 DAG（有向無環圖）</text:span><text:span text:style-name="T18"/></text:p>
          </table:table-cell>
        </table:table-row>
      </table:table>
      <text:p text:style-name="P6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" loext:marker-style-name="T21"><text:span text:style-name="T22">專有名詞</text:span><text:span text:style-name="T21"/></text:p>
          </table:table-cell>
          <table:table-cell table:style-name="表格3.A1" office:value-type="string">
            <text:p text:style-name="P9" loext:marker-style-name="T21"><text:span text:style-name="T22">說明</text:span><text:span text:style-name="T21"/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Vertex</text:span><text:span text:style-name="T22">（頂點）</text:span></text:p>
          </table:table-cell>
          <table:table-cell table:style-name="表格3.B2" office:value-type="string">
            <text:p text:style-name="P9" loext:marker-style-name="T11"><text:span text:style-name="T13">圖中每個節點。例：城市、課程、工作項目</text:span><text:span text:style-name="T11"/></text:p>
          </table:table-cell>
        </table:table-row>
        <table:table-row table:style-name="表格3.1">
          <table:table-cell table:style-name="表格3.B2" office:value-type="string">
            <text:p text:style-name="P9" loext:marker-style-name="T21"><text:span text:style-name="T23">Edge</text:span><text:span text:style-name="T22">（邊）</text:span></text:p>
          </table:table-cell>
          <table:table-cell table:style-name="表格3.B2" office:value-type="string">
            <text:p text:style-name="P9" loext:marker-style-name="T11"><text:span text:style-name="T13">頂點之間的連線。有向邊有箭頭方向，無向邊雙向皆可</text:span><text:span text:style-name="T11"/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Degree</text:span><text:span text:style-name="T21"/></text:p>
          </table:table-cell>
          <table:table-cell table:style-name="表格3.B2" office:value-type="string">
            <text:p text:style-name="P9" loext:marker-style-name="T11"><text:span text:style-name="T13">一個頂點連接的邊數。有向圖分</text:span><text:span text:style-name="T24"> </text:span><text:span text:style-name="T25">in-degree</text:span><text:span text:style-name="T24">（進入）</text:span><text:span text:style-name="T13">與 </text:span><text:span text:style-name="T26">out-degree</text:span><text:span text:style-name="T27">（離開）</text:span></text:p>
          </table:table-cell>
        </table:table-row>
        <table:table-row table:style-name="表格3.1">
          <table:table-cell table:style-name="表格3.B2" office:value-type="string">
            <text:p text:style-name="P9" loext:marker-style-name="T21"><text:span text:style-name="T23">DAG</text:span><text:span text:style-name="T21"/></text:p>
          </table:table-cell>
          <table:table-cell table:style-name="表格3.B2" office:value-type="string">
            <text:p text:style-name="P9" loext:marker-style-name="T11"><text:span text:style-name="T12">Directed Acyclic Graph</text:span><text:span text:style-name="T13">，有向無環圖，</text:span><text:span text:style-name="T12">Topological Sort </text:span><text:span text:style-name="T13">的前提條件</text:span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Sparse / Dense</text:span><text:span text:style-name="T21"/></text:p>
          </table:table-cell>
          <table:table-cell table:style-name="表格3.B2" office:value-type="string">
            <text:p text:style-name="P9" loext:marker-style-name="T11"><text:span text:style-name="T13">稀疏圖：邊少（</text:span><text:span text:style-name="T12">|E| ≪ V²</text:span><text:span text:style-name="T13">）；稠密圖：邊多（</text:span><text:span text:style-name="T12">|E| </text:span><text:span text:style-name="T13">接近 </text:span><text:span text:style-name="T12">V²</text:span><text:span text:style-name="T13">）</text:span></text:p>
          </table:table-cell>
        </table:table-row>
      </table:table>
      <text:p text:style-name="Standard"/>
      <text:h text:style-name="P4" text:outline-level="1" loext:marker-style-name="T9"><text:span text:style-name="T10">二、圖的三種表示法（含完整圖解）</text:span><text:span text:style-name="T9"/></text:h>
      <text:h text:style-name="P10" text:outline-level="2" loext:marker-style-name="T28"><text:span text:style-name="T28">2-1 Adjacency Matrix</text:span><text:span text:style-name="T29">（</text:span><text:span text:style-name="T30">相鄰矩陣</text:span><text:span text:style-name="T29">）</text:span></text:h>
      <text:p text:style-name="P5" loext:marker-style-name="T11"><text:span text:style-name="T31">把圖</text:span><text:span text:style-name="T32">轉成一張 </text:span><text:span text:style-name="T33">V×V </text:span><text:span text:style-name="T32">的二維表格</text:span><text:span text:style-name="T13">，</text:span><text:span text:style-name="T24">兩點有邊填 </text:span><text:span text:style-name="T25">1</text:span><text:span text:style-name="T24">（或權重）</text:span><text:span text:style-name="T13">，</text:span><text:span text:style-name="T34">無邊填 </text:span><text:span text:style-name="T35">0</text:span><text:span text:style-name="T13">。</text:span></text:p>
      <text:p text:style-name="P6"/>
      <text:p text:style-name="P7" loext:marker-style-name="T14"><text:span text:style-name="T15"><text:s text:c="2"/>▎ </text:span><text:span text:style-name="T16">建構過程圖解（以 </text:span><text:span text:style-name="T15">A-B</text:span><text:span text:style-name="T16">、</text:span><text:span text:style-name="T15">A-C</text:span><text:span text:style-name="T16">、</text:span><text:span text:style-name="T15">B-C </text:span><text:span text:style-name="T1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 loext:marker-style-name="T18"><text:span text:style-name="T18"><text:s text:c="2"/>圖形： <text:s text:c="19"/>轉成矩陣：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30"/>A <text:s/>B <text:s/>C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A ─── B <text:s text:c="13"/>A <text:s/>[ 0 <text:s/>1 <text:s/>1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5"/>\ <text:s text:c="2"/>/ <text:s text:c="14"/>B <text:s/>[ 1 <text:s/>0 <text:s/>1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6"/>\ / <text:s text:c="15"/>C <text:s/>[ 1 <text:s/>1 <text:s/>0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7"/>C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/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2"/>規則：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A-B 有邊</text:span><text:span text:style-name="T18"> <text:s/>→ <text:s/></text:span><text:span text:style-name="T36">matrix[A][B]=1 且 matrix[B][A]=1</text:span><text:span text:style-name="T18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A-C 有邊</text:span><text:span text:style-name="T18"> <text:s/>→ <text:s/></text:span><text:span text:style-name="T36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B-C 有邊</text:span><text:span text:style-name="T18"> <text:s/>→ <text:s/></text:span><text:span text:style-name="T36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對角線 <text:s text:c="3"/>→ <text:s/>自己到自己 = 0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37">空間複雜度 </text:span><text:span text:style-name="T38">O(V²) </text:span><text:span text:style-name="T1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 loext:marker-style-name="T18"><text:span text:style-name="T18"><text:s text:c="2"/>問：為什麼空間是 </text:span><text:span text:style-name="T39">O(V²)</text:span><text:span text:style-name="T18">？</text:span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</text:span><text:span text:style-name="T40">矩陣大小</text:span><text:span text:style-name="T18"> = </text:span><text:span text:style-name="T41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範例：V=1000 個頂點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4"/>需要 1000 × 1000 = 1,000,000 個格子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即使只有 10 條邊，也要開 100 萬格 → 浪費！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所以：稀疏圖用矩陣很不划算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但稠密圖（邊很多）：每格只要 1 bit → 非常精簡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1,000,000 bits = 約 122 KB（很小！）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查邊速度 </text:span><text:span text:style-name="T15">O(1) </text:span><text:span text:style-name="T1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 loext:marker-style-name="T18"><text:span text:style-name="T18"><text:s text:c="2"/>問：</text:span><text:span text:style-name="T36">A 和 B 之間有沒有邊</text:span><text:span text:style-name="T18">？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2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2">→ 一步就知道答案</text:span><text:span text:style-name="T18">，不需要搜尋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→ </text:span><text:span text:style-name="T43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問：</text:span><text:span text:style-name="T36">計算所有頂點的 Degree</text:span><text:span text:style-name="T18">？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1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39">全部 V 個頂點都要算 → V × O(V)</text:span><text:span text:style-name="T18"> = O(V²) = O(n²)</text:span></text:p>
          </table:table-cell>
        </table:table-row>
      </table:table>
      <text:h text:style-name="P10" text:outline-level="2" loext:marker-style-name="T28"><text:span text:style-name="T28">2-2 Adjacency List</text:span><text:span text:style-name="T29">（</text:span><text:span text:style-name="T30">相鄰串列</text:span><text:span text:style-name="T29">）</text:span></text:h>
      <text:p text:style-name="P5" loext:marker-style-name="T11"><text:span text:style-name="T32">每個頂點建一條鏈結串列，只記錄「真正存在」的鄰居</text:span><text:span text:style-name="T13">，不存 </text:span><text:span text:style-name="T12">0</text:span><text:span text:style-name="T13">。</text:span></text:p>
      <text:p text:style-name="P6"/>
      <text:p text:style-name="P7" loext:marker-style-name="T14"><text:span text:style-name="T15"><text:s text:c="2"/>▎ </text:span><text:span text:style-name="T1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 loext:marker-style-name="T18"><text:span text:style-name="T18"><text:s text:c="2"/>圖形： <text:s text:c="19"/>轉成串列：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8"/></text:span><text:span text:style-name="T18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8" loext:marker-style-name="T18"><text:span text:style-name="T18"><text:s text:c="4"/>A ─── B <text:s text:c="13"/>A <text:s/>→ <text:s/>[B] <text:s/>→ <text:s/>[C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5"/>\ <text:s text:c="2"/>/ <text:s text:c="14"/>B <text:s/>→ <text:s/>[A] <text:s/>→ <text:s/>[C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6"/>\ / <text:s text:c="15"/>C <text:s/>→ <text:s/>[A] <text:s/>→ <text:s/>[B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7"/>C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/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</text:span><text:span text:style-name="T42">只存「有邊」的部分</text:span><text:span text:style-name="T18">，不存 0</text:span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</text:span><text:span text:style-name="T44">A-B 這條邊出現兩次</text:span><text:span text:style-name="T18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（這就是 </text:span><text:span text:style-name="T45">Adjacency List 的缺點：同一條邊存兩份</text:span><text:span text:style-name="T18">）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37">空間複雜度 </text:span><text:span text:style-name="T38">O(V+E) </text:span><text:span text:style-name="T1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 loext:marker-style-name="T18"><text:span text:style-name="T18"><text:s text:c="2"/></text:span><text:span text:style-name="T20">總共需要儲存的資料</text:span><text:span text:style-name="T18">：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① </text:span><text:span text:style-name="T44">V 個頂點的「起始節點」</text:span><text:span text:style-name="T18"> <text:s text:c="6"/>→ </text:span><text:span text:style-name="T39">V 個單元</text:span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② </text:span><text:span text:style-name="T44">每條邊在兩端各存一次</text:span><text:span text:style-name="T46"> </text:span><text:span text:style-name="T18"><text:s text:c="9"/>→ </text:span><text:span text:style-name="T39">2E 個單元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</text:span><text:span text:style-name="T39">總空間 = V + 2E</text:span><text:span text:style-name="T18"> = O(V + E)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範例比較（V=1000，只有 10 條邊）：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矩陣：1000 × 1000 = 1,000,000 格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串列：1000 + 2×10 <text:s/>= <text:s text:c="5"/>1,020 格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→ 差了將近 1000 倍！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查邊速度 </text:span><text:span text:style-name="T15">O(degree) </text:span><text:span text:style-name="T1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 loext:marker-style-name="T18"><text:span text:style-name="T18"><text:s text:c="2"/>⚠ 先搞清楚一個初學者最常誤解的地方！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36">A 的鄰接串列</text:span><text:span text:style-name="T18">：</text:span><text:span text:style-name="T42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36">這裡的箭頭</text:span><text:span text:style-name="T47">「→」是 Linked List 的 next 指標</text:span><text:span text:style-name="T18">，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48">意思是「下一個節點」</text:span><text:span text:style-name="T18">，</text:span><text:span text:style-name="T49">不是圖的邊！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42">正確的解讀方式</text:span><text:span text:style-name="T18">：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4"/></text:span><text:span text:style-name="T39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50">錯誤的解讀方式（千萬別這樣想！）</text:span><text:span text:style-name="T18">：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4"/></text:span><text:span text:style-name="T51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正確圖形長這樣：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7"/>B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7"/>|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7"/>A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6"/>/ \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5"/>C <text:s text:c="2"/>D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（</text:span><text:span text:style-name="T39">A 分別連到 B、C、D</text:span><text:span text:style-name="T18">，</text:span><text:span text:style-name="T51">B/C/D 彼此之間沒有邊</text:span><text:span text:style-name="T18">）</text:span>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 loext:marker-style-name="T18"><text:span text:style-name="T18"><text:s text:c="2"/>現在來看：查 A 和 D 之間有沒有邊？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A 的鄰接串列：[B] → [C] → [D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因為串列沒有排序，你不知道 D 藏在哪裡，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只能從頭一個一個往後找：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第 1 步：看 B，不是 D，繼續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第 2 步：看 C，不是 D，繼續</text:span><text:span text:style-name="T18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8" loext:marker-style-name="T18"><text:span text:style-name="T18"><text:s text:c="4"/>第 3 步：看 D，找到了！停止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→ 走了 3 步，找到答案：A 和 D 有邊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最壞情況 1：目標在串列最尾端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串列：[B] → [C] → [D] → [E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查 E：B → C → D → E <text:s/>→ 走 4 步才找到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最壞情況 2：目標根本不存在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串列：[B] → [C] → [D] → [E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查 F：B → C → D → E → NULL <text:s/>→ 走 4 步，走到底才確認沒有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兩種最壞情況，都必須把整條串列從頭走到尾。</text:span><text:span text:style-name="T18"/></text:p>
          </table:table-cell>
        </table:table-row>
      </table:table>
      <text:p text:style-name="P6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 loext:marker-style-name="T18"><text:span text:style-name="T18"><text:s text:c="2"/></text:span><text:span text:style-name="T39">為什麼時間是 O(degree)，而不是 O(V)</text:span><text:span text:style-name="T18">？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/></text:span><text:span text:style-name="T47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2"/>範例：圖有 1000 個頂點（V=1000），但 A 只連了 3 個頂點</text:span><text:span text:style-name="T18"/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42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36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50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36">根本不需要掃描其他 997 個頂點</text:span><text:span text:style-name="T18">！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2"/>所以 </text:span><text:span text:style-name="T52">O(degree) 比 O(V) 更精確</text:span><text:span text:style-name="T18">：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O(degree(A)) ≤ O(V-1) = O(V) <text:s/>（degree 最大是 V-1）</text:span><text:span text:style-name="T18"/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在稀疏圖中 degree &lt;&lt; V，因此通常遠比 O(V) 快</text:span><text:span text:style-name="T18"/></text:p>
          </table:table-cell>
        </table:table-row>
      </table:table>
      <text:h text:style-name="P10" text:outline-level="2" loext:marker-style-name="T28"><text:span text:style-name="T28">2-3 Adjacency Multilist</text:span><text:span text:style-name="T29">（相鄰多重串列）</text:span></text:h>
      <text:p text:style-name="P5" loext:marker-style-name="T11"><text:span text:style-name="T13">先記住這一句話：</text:span><text:span text:style-name="T53">Adjacency Multilist</text:span><text:span text:style-name="T12"> = </text:span><text:span text:style-name="T13">為了讓</text:span><text:span text:style-name="T54">「同一條邊只存一次」</text:span><text:span text:style-name="T31">而發明的資料結構</text:span><text:span text:style-name="T13">。</text:span></text:p>
      <text:p text:style-name="P6"/>
      <text:p text:style-name="P7" loext:marker-style-name="T14"><text:span text:style-name="T15"><text:s text:c="2"/>▎ </text:span><text:span text:style-name="T16">第一步：先看 </text:span><text:span text:style-name="T15">Adjacency List </text:span><text:span text:style-name="T1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8" loext:marker-style-name="T18"><text:span text:style-name="T18"><text:s text:c="2"/>圖形： <text:s text:c="22"/>三條邊：(A,B) <text:s/>(A,C) <text:s/>(B,C)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A ----- B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5"/>\ <text:s text:c="4"/>/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6"/>\ <text:s text:c="2"/>/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8"/>C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用 Adjacency List 存：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A → [B] → [C] → NULL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B → [A] → [C] → NULL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C → [A] → [B] → NULL</text:span><text:span text:style-name="T18"/></text:p>
          </table:table-cell>
        </table:table-row>
        <table:table-row table:style-name="表格12.1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仔細數數看：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A,B) 存了兩份</text:span><text:span text:style-name="T18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A,C) 存了兩份</text:span><text:span text:style-name="T18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B,C) 存了兩份</text:span><text:span text:style-name="T18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→ </text:span><text:span text:style-name="T48">3 條邊，卻存了 6 份資料！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" loext:marker-style-name="T18"><text:span text:style-name="T18"><text:s text:c="2"/></text:span><text:span text:style-name="T43">假設要刪除邊 A-B</text:span><text:span text:style-name="T18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</text:span><text:span text:style-name="T43">你必須同時修改兩個地方</text:span><text:span text:style-name="T18">：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① </text:span><text:span text:style-name="T36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② </text:span><text:span text:style-name="T36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如果只改一邊，就會造成資料不一致：</text:span><text:span text:style-name="T18"/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A 沒有 B <text:s/>←→ <text:s/>B 卻還有 A <text:s/>→ 資料壞掉！</text:span><text:span text:style-name="T18"/></text:p>
          </table:table-cell>
        </table:table-row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有人就想：</text:span><text:span text:style-name="T39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這樣</text:span><text:span text:style-name="T40">刪除時只要改一個地方就好</text:span><text:span text:style-name="T18">。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→ 這就是 Adjacency Multilist 的發明動機。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三步：</text:span><text:span text:style-name="T15">Multilist </text:span><text:span text:style-name="T1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" loext:marker-style-name="T18"><text:span text:style-name="T18"><text:s text:c="2"/>以前（Adjacency List）：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邊 A-B 存兩份： <text:s/>A → [B] <text:s text:c="2"/>和 <text:s text:c="2"/>B → [A]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2"/>現在（</text:span><text:span text:style-name="T20">Multilist</text:span><text:span text:style-name="T18">）：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</text:span><text:span text:style-name="T56">邊 A-B 只建立一個 Edge 節點 e1</text:span><text:span text:style-name="T18">，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A 和 B 兩端都直接指向它：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8"/>A ─────┐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15"/>▼</text:span><text:span text:style-name="T18"/></text:p>
          </table:table-cell>
        </table:table-row>
        <table:table-row table:style-name="表格14.10">
          <table:table-cell table:style-name="表格14.A1" office:value-type="string">
            <text:p text:style-name="P8" loext:marker-style-name="T18"><text:span text:style-name="T18"><text:s text:c="15"/></text:span><text:span text:style-name="T57">e1 = (A, B)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15"/>▲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8"/>B ─────┘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2"/>→ </text:span><text:span text:style-name="T58">A 和 B 共用同一個 e1</text:span><text:span text:style-name="T18">，不再各自存一份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四步：三條邊時，建立三個 </text:span><text:span text:style-name="T15">Edge </text:span><text:span text:style-name="T1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8" loext:marker-style-name="T18"><text:span text:style-name="T18"><text:s text:c="2"/></text:span><text:span text:style-name="T36">圖形有三條邊</text:span><text:span text:style-name="T18"> → </text:span><text:span text:style-name="T59">只建立三個 Edge 節點</text:span><text:span text:style-name="T18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1 = (A, B) <text:s text:c="3"/>e2 = (A, C) <text:s text:c="3"/>e3 = (B, C)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每個節點長這樣（先不管後兩格）：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1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A │ V2=B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2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A │ V2=C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3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B │ V2=C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五步：</text:span><text:span text:style-name="T37">為什麼需要 </text:span><text:span text:style-name="T38">link1 </text:span><text:span text:style-name="T37">和 </text:span><text:span text:style-name="T38">link2</text:span><text:span text:style-name="T3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" loext:marker-style-name="T18"><text:span text:style-name="T18"><text:s text:c="2"/>問題：</text:span><text:span text:style-name="T47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以 A 為例：A 有兩條邊，e1=(A,B) 和 e2=(A,C)</text:span><text:span text:style-name="T18"/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/></text:span><text:span text:style-name="T60"><text:s/>A 需要從 e1 繼續找到 e2</text:span><text:span text:style-name="T18">，</text:span><text:span text:style-name="T36">才能知道自己所有的邊</text:span><text:span text:style-name="T18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以 B 為例：B 也有兩條邊，e1=(A,B) 和 e3=(B,C)</text:span><text:span text:style-name="T18"/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</text:span><text:span text:style-name="T60">B 需要從 e1 繼續找到 e3</text:span><text:span text:style-name="T18">。</text:span></text:p>
          </table:table-cell>
        </table:table-row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但是 </text:span><text:span text:style-name="T61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</text:span><text:span text:style-name="T48">同一個 e1 節點，要同時記錄這兩條不同的路線</text:span><text:span text:style-name="T18">。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→ 所以 </text:span><text:span text:style-name="T50">e1 裡面需要兩個指標</text:span><text:span text:style-name="T18">：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6"/></text:span><text:span text:style-name="T36">link1：</text:span><text:span text:style-name="T39">給 V1（也就是 A）用</text:span><text:span text:style-name="T18">，</text:span><text:span text:style-name="T36">記錄</text:span><text:span text:style-name="T62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6"/></text:span><text:span text:style-name="T36">link2：</text:span><text:span text:style-name="T39">給 V2（也就是 B）用</text:span><text:span text:style-name="T18">，</text:span><text:span text:style-name="T36">記錄</text:span><text:span text:style-name="T63">「B 的下一條邊」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六步：把 </text:span><text:span text:style-name="T15">link1 / link2 </text:span><text:span text:style-name="T1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" loext:marker-style-name="T18"><text:span text:style-name="T18"><text:s text:c="2"/>【站在 A 的角度】 </text:span><text:span text:style-name="T42">A 的邊：e1=(A,B) → e2=(A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</text:span><text:span text:style-name="T47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2 中，A 是 V1，A 沒有下一條邊了： <text:s/>link1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【站在 B 的角度】 </text:span><text:span text:style-name="T42">B 的邊：e1=(A,B) → e3=(B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</text:span><text:span text:style-name="T47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3 中，B 是 V1，B 沒有下一條邊了： <text:s/>link1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【站在 C 的角度】 </text:span><text:span text:style-name="T42">C 的邊：e2=(A,C) → e3=(B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3"/></text:span><text:span text:style-name="T47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3 中，C 是 V2，C 沒有下一條邊了： <text:s/>link2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填完之後，完整的記憶體方塊如下：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1: ┌──────┬──────┬──────────┬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A │ V2=B │ link1=e2 │ link2=e3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┴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</text:span><text:span text:style-name="T39">A的下一條</text:span><text:span text:style-name="T18"> <text:s/>↑</text:span><text:span text:style-name="T39">B的下一條</text:span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2: ┌──────┬──────┬────────────┬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A │ V2=C │ link1=NULL │ link2=e3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──┴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A已沒有邊 <text:s text:c="2"/>↑C的下一條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3: ┌──────┬──────┬────────────┬──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B │ V2=C │ link1=NULL │ link2=NULL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──┴──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B已沒有邊 <text:s text:c="2"/>↑C已沒有邊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" loext:marker-style-name="T18"><text:span text:style-name="T18"><text:s text:c="2"/>頂點起始指標（每個頂點記錄「第一條邊」是誰）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36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36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20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A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A 的起始指標出發 → e1=(A,B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4">A 是 e1 的 V1</text:span><text:span text:style-name="T18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2=(A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6"/></text:span><text:span text:style-name="T64"><text:s/>A 是 e2 的 V1</text:span><text:span text:style-name="T18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8" loext:marker-style-name="T18"><text:span text:style-name="T18"><text:s text:c="4"/>結果：A 的邊 = (A,B) 和 (A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B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B 的起始指標出發 → e1=(A,B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5">B 是 e1 的 V2</text:span><text:span text:style-name="T18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3=(B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5">B 是 e3 的 V1</text:span><text:span text:style-name="T18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結果：B 的邊 = (A,B) 和 (B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C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C 的起始指標出發 → e2=(A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50">C 是 e2 的 V2</text:span><text:span text:style-name="T18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3=(B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50">C 是 e3 的 V2</text:span><text:span text:style-name="T18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結果：C 的邊 = (A,C) 和 (B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關鍵：e1、e2、e3 每個只有一份！A/B/C 各自沿著自己的路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（link1 或 link2）走，互不干擾，卻共用同一批節點。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考試申論題標準答案：</text:span><text:span text:style-name="T37">為什麼 </text:span><text:span text:style-name="T38">Edge </text:span><text:span text:style-name="T37">節點需要 </text:span><text:span text:style-name="T38">link1 </text:span><text:span text:style-name="T37">和 </text:span><text:span text:style-name="T38">link2</text:span><text:span text:style-name="T1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8" loext:marker-style-name="T18"><text:span text:style-name="T18"><text:s text:c="2"/>因為一條邊同時連接兩個頂點 V1 和 V2。</text:span><text:span text:style-name="T18"/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當</text:span><text:span text:style-name="T66">從 V1 端走訪其所有邊時</text:span><text:span text:style-name="T18">，需要 </text:span><text:span text:style-name="T67">link1</text:span><text:span text:style-name="T19"> 指向 V1 的下一條邊</text:span><text:span text:style-name="T18">；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當</text:span><text:span text:style-name="T66">從 V2 端走訪其所有邊時</text:span><text:span text:style-name="T18">，需要 </text:span><text:span text:style-name="T67">link2</text:span><text:span text:style-name="T19"> 指向 V2 的下一條邊</text:span><text:span text:style-name="T18">。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</text:span><text:span text:style-name="T36">兩端的「下一條邊」</text:span><text:span text:style-name="T18">通常是</text:span><text:span text:style-name="T47">不同的邊節點</text:span><text:span text:style-name="T18">，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因此 </text:span><text:span text:style-name="T45">Edge 節點必須同時保存 link1 與 link2 兩個鏈結指標</text:span><text:span text:style-name="T18">。</text:span></text:p>
          </table:table-cell>
        </table:table-row>
      </table:table>
      <text:p text:style-name="P6"/>
      <text:p text:style-name="P7" loext:marker-style-name="T14"><text:span text:style-name="T15"><text:s text:c="2"/>▎ Degree </text:span><text:span text:style-name="T1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39">計算「所有頂點的 Degree」</text:span><text:span text:style-name="T18">：</text:span></text:p>
          </table:table-cell>
        </table:table-row>
        <table:table-row table:style-name="表格20.2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42">Matrix 做法</text:span><text:span text:style-name="T18">：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60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需要看 n² 個格子 → </text:span><text:span text:style-name="T47">O(n²)</text:span></text:p>
          </table:table-cell>
        </table:table-row>
        <table:table-row table:style-name="表格20.1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42">Multilist 做法</text:span><text:span text:style-name="T18">：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60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19">檢查所有 e 條邊</text:span><text:span text:style-name="T40">（每條邊會從兩端各被看到一次）</text:span><text:span text:style-name="T50">→ 2e 步</text:span></text:p>
          </table:table-cell>
        </table:table-row>
        <table:table-row table:style-name="表格20.1">
          <table:table-cell table:style-name="表格20.A10" office:value-type="string">
            <text:p text:style-name="P8" loext:marker-style-name="T18"><text:span text:style-name="T18"><text:s text:c="4"/></text:span><text:span text:style-name="T68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總計 </text:span><text:span text:style-name="T47">n + 2e = O(n+e)</text:span></text:p>
          </table:table-cell>
        </table:table-row>
        <table:table-row table:style-name="表格20.1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範例（n=10000，e=20）：</text:span><text:span text:style-name="T18"/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Matrix <text:s text:c="2"/>→ 100,000,000 步</text:span><text:span text:style-name="T18"/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Multilist → <text:s text:c="5"/>10,040 步 <text:s/>（快 10000 倍！）</text:span><text:span text:style-name="T18"/></text:p>
          </table:table-cell>
        </table:table-row>
      </table:table>
      <text:h text:style-name="P10" text:outline-level="2" loext:marker-style-name="T28"><text:span text:style-name="T28">2-4 </text:span><text:span text:style-name="T29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9" loext:marker-style-name="T69"><text:span text:style-name="T70">比較項目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Matrix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List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Multilist</text:span><text:span text:style-name="T69"/></text:p>
          </table:table-cell>
          <table:table-cell table:style-name="表格21.A1" office:value-type="string">
            <text:p text:style-name="P9" loext:marker-style-name="T69"><text:span text:style-name="T70">備註</text:span><text:span text:style-name="T69"/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空間複雜度</text:span><text:span text:style-name="T72"/></text:p>
          </table:table-cell>
          <table:table-cell table:style-name="表格21.B2" office:value-type="string">
            <text:p text:style-name="P11" loext:marker-style-name="T74"><text:span text:style-name="T75">O(V²)</text:span><text:span text:style-name="T74"/></text:p>
          </table:table-cell>
          <table:table-cell table:style-name="表格21.C2" office:value-type="string">
            <text:p text:style-name="P11" loext:marker-style-name="T76"><text:span text:style-name="T77">O(V+E)</text:span><text:span text:style-name="T76"/></text:p>
          </table:table-cell>
          <table:table-cell table:style-name="表格21.C2" office:value-type="string">
            <text:p text:style-name="P11" loext:marker-style-name="T76"><text:span text:style-name="T77">O(V+E)</text:span><text:span text:style-name="T76"/></text:p>
          </table:table-cell>
          <table:table-cell table:style-name="表格21.E2" office:value-type="string">
            <text:p text:style-name="P9" loext:marker-style-name="T11"><text:span text:style-name="T13">稀疏圖用 </text:span><text:span text:style-name="T12">List/Multilist</text:span></text:p>
          </table:table-cell>
        </table:table-row>
        <table:table-row table:style-name="表格21.1">
          <table:table-cell table:style-name="表格21.E2" office:value-type="string">
            <text:p text:style-name="P9" loext:marker-style-name="T72"><text:span text:style-name="T73">查邊速度</text:span><text:span text:style-name="T72"/></text:p>
          </table:table-cell>
          <table:table-cell table:style-name="表格21.C2" office:value-type="string">
            <text:p text:style-name="P11" loext:marker-style-name="T76"><text:span text:style-name="T77">O(1)</text:span><text:span text:style-name="T76"/></text:p>
          </table:table-cell>
          <table:table-cell table:style-name="表格21.B2" office:value-type="string">
            <text:p text:style-name="P11" loext:marker-style-name="T74"><text:span text:style-name="T75">O(degree)</text:span><text:span text:style-name="T74"/></text:p>
          </table:table-cell>
          <table:table-cell table:style-name="表格21.B2" office:value-type="string">
            <text:p text:style-name="P11" loext:marker-style-name="T74"><text:span text:style-name="T75">O(degree)</text:span><text:span text:style-name="T74"/></text:p>
          </table:table-cell>
          <table:table-cell table:style-name="表格21.E2" office:value-type="string">
            <text:p text:style-name="P9" loext:marker-style-name="T11"><text:span text:style-name="T13">查詢快 → 選矩陣</text:span><text:span text:style-name="T11"/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計算全部 </text:span><text:span text:style-name="T78">Degree</text:span></text:p>
          </table:table-cell>
          <table:table-cell table:style-name="表格21.B2" office:value-type="string">
            <text:p text:style-name="P11" loext:marker-style-name="T74"><text:span text:style-name="T75">O(n²)</text:span><text:span text:style-name="T74"/></text:p>
          </table:table-cell>
          <table:table-cell table:style-name="表格21.C2" office:value-type="string">
            <text:p text:style-name="P11" loext:marker-style-name="T76"><text:span text:style-name="T77">O(n+e)</text:span><text:span text:style-name="T76"/></text:p>
          </table:table-cell>
          <table:table-cell table:style-name="表格21.C2" office:value-type="string">
            <text:p text:style-name="P11" loext:marker-style-name="T76"><text:span text:style-name="T77">O(n+e)</text:span><text:span text:style-name="T76"/></text:p>
          </table:table-cell>
          <table:table-cell table:style-name="表格21.A2" office:value-type="string">
            <text:p text:style-name="P9" loext:marker-style-name="T11"><text:span text:style-name="T12">Multilist </text:span><text:span text:style-name="T13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9" loext:marker-style-name="T72"><text:span text:style-name="T73">邊的儲存次數</text:span><text:span text:style-name="T72"/></text:p>
          </table:table-cell>
          <table:table-cell table:style-name="表格21.E2" office:value-type="string">
            <text:p text:style-name="P11" loext:marker-style-name="T11"><text:span text:style-name="T12">1</text:span><text:span text:style-name="T13">次</text:span><text:span text:style-name="T12">/</text:span><text:span text:style-name="T13">格</text:span></text:p>
          </table:table-cell>
          <table:table-cell table:style-name="表格21.B2" office:value-type="string">
            <text:p text:style-name="P11" loext:marker-style-name="T79"><text:span text:style-name="T80">存兩次（無向）</text:span><text:span text:style-name="T79"/></text:p>
          </table:table-cell>
          <table:table-cell table:style-name="表格21.C2" office:value-type="string">
            <text:p text:style-name="P11" loext:marker-style-name="T81"><text:span text:style-name="T24">只存一次 ✓</text:span><text:span text:style-name="T81"/></text:p>
          </table:table-cell>
          <table:table-cell table:style-name="表格21.E2" office:value-type="string">
            <text:p text:style-name="P9" loext:marker-style-name="T11"><text:span text:style-name="T12">Multilist </text:span><text:span text:style-name="T13">最省</text:span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適合圖形</text:span><text:span text:style-name="T72"/></text:p>
          </table:table-cell>
          <table:table-cell table:style-name="表格21.B6" office:value-type="string">
            <text:p text:style-name="P11" loext:marker-style-name="T82"><text:span text:style-name="T83">Dense</text:span><text:span text:style-name="T84">（稠密）</text:span></text:p>
          </table:table-cell>
          <table:table-cell table:style-name="表格21.C6" office:value-type="string">
            <text:p text:style-name="P11" loext:marker-style-name="T85"><text:span text:style-name="T86">Sparse</text:span><text:span text:style-name="T87">（稀疏）</text:span></text:p>
          </table:table-cell>
          <table:table-cell table:style-name="表格21.C6" office:value-type="string">
            <text:p text:style-name="P11" loext:marker-style-name="T85"><text:span text:style-name="T86">Sparse</text:span><text:span text:style-name="T87">（稀疏）</text:span></text:p>
          </table:table-cell>
          <table:table-cell table:style-name="表格21.A2" office:value-type="string">
            <text:p text:style-name="P9"/>
          </table:table-cell>
        </table:table-row>
      </table:table>
      <text:p text:style-name="Standard"/>
      <text:h text:style-name="P4" text:outline-level="1" loext:marker-style-name="T9"><text:span text:style-name="T10">三、</text:span><text:span text:style-name="T9">BFS</text:span><text:span text:style-name="T10">（</text:span><text:span text:style-name="T88">廣度優先</text:span><text:span text:style-name="T10">搜尋）─ 含完整圖解</text:span></text:h>
      <text:p text:style-name="P5" loext:marker-style-name="T11"><text:span text:style-name="T89">Breadth-First</text:span><text:span text:style-name="T12"> Search</text:span><text:span text:style-name="T13">｜</text:span><text:span text:style-name="T24">使用 </text:span><text:span text:style-name="T25">Queue</text:span><text:span text:style-name="T13">（</text:span><text:span text:style-name="T12">FIFO </text:span><text:span text:style-name="T13">佇列）</text:span></text:p>
      <text:p text:style-name="P6"/>
      <text:h text:style-name="P10" text:outline-level="2" loext:marker-style-name="T28"><text:span text:style-name="T28">3-1 </text:span><text:span text:style-name="T29">核心概念圖解</text:span></text:h>
      <text:p text:style-name="P7" loext:marker-style-name="T14"><text:span text:style-name="T15"><text:s text:c="2"/>▎ </text:span><text:span text:style-name="T1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8" loext:marker-style-name="T18"><text:span text:style-name="T18"><text:s text:c="2"/>圖形（樹狀）：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9"/>A <text:s text:c="9"/>← 第 0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7"/>/ <text:s text:c="2"/>\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5"/>B <text:s text:c="6"/>C <text:s text:c="5"/>← 第 1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4"/>/ \ <text:s text:c="4"/>/ \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3"/>D <text:s text:c="2"/>E <text:s text:c="2"/>F <text:s text:c="2"/>G <text:s text:c="3"/>← 第 2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BFS 從 A 出發，一層一層往外走：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0 層：拜訪 A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1 層：拜訪 B、C（A 的鄰居全部先拜訪完）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2 層：拜訪 D、E、F、G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輸出順序：A → B → C → D → E → F → G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比喻：水面漣漪，從中心一圈一圈向外擴散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3-2 BFS </text:span><text:span text:style-name="T29">逐步追蹤（詳細步驟）</text:span></text:h>
      <text:p text:style-name="P7" loext:marker-style-name="T14"><text:span text:style-name="T15"><text:s text:c="2"/>▎ </text:span><text:span text:style-name="T1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8" loext:marker-style-name="T18"><text:span text:style-name="T18"><text:s text:c="6"/>A ── B ── D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6"/>| <text:s text:c="8"/>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6"/>C ── E <text:s text:c="2"/>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/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2"/>邊：A-B <text:s/>A-C <text:s/>B-D <text:s/>C-E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2"/>從 A 開始 BFS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1" loext:marker-style-name="T69"><text:span text:style-name="T70">步</text:span><text:span text:style-name="T69"/></text:p>
          </table:table-cell>
          <table:table-cell table:style-name="表格24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24.A1" office:value-type="string">
            <text:p text:style-name="P11" loext:marker-style-name="T69"><text:span text:style-name="T71">Queue </text:span><text:span text:style-name="T70">狀態（左</text:span><text:span text:style-name="T71">=</text:span><text:span text:style-name="T70">隊首）</text:span></text:p>
          </table:table-cell>
          <table:table-cell table:style-name="表格24.A1" office:value-type="string">
            <text:p text:style-name="P11" loext:marker-style-name="T69"><text:span text:style-name="T70">已拜訪</text:span><text:span text:style-name="T69"/></text:p>
          </table:table-cell>
          <table:table-cell table:style-name="表格24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0"><text:span text:style-name="T91">初始</text:span><text:span text:style-name="T90"/></text:p>
          </table:table-cell>
          <table:table-cell table:style-name="表格24.A2" office:value-type="string">
            <text:p text:style-name="P9" loext:marker-style-name="T11"><text:span text:style-name="T12">push </text:span><text:span text:style-name="T13">起點 </text:span><text:span text:style-name="T12">A</text:span><text:span text:style-name="T13">，加入已拜訪</text:span></text:p>
          </table:table-cell>
          <table:table-cell table:style-name="表格24.A2" office:value-type="string">
            <text:p text:style-name="P11" loext:marker-style-name="T92"><text:span text:style-name="T92">[ A ]</text:span><text:span text:style-name="T92"/></text:p>
          </table:table-cell>
          <table:table-cell table:style-name="表格24.A2" office:value-type="string">
            <text:p text:style-name="P11" loext:marker-style-name="T11"><text:span text:style-name="T12">{A}</text:span><text:span text:style-name="T11"/></text:p>
          </table:table-cell>
          <table:table-cell table:style-name="表格24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0"><text:span text:style-name="T93">①</text:span><text:span text:style-name="T90"/></text:p>
          </table:table-cell>
          <table:table-cell table:style-name="表格24.A3" office:value-type="string">
            <text:p text:style-name="P9" loext:marker-style-name="T11"><text:span text:style-name="T12">dequeue A → </text:span><text:span text:style-name="T13">輸出 </text:span><text:span text:style-name="T12">A </text:span><text:span text:style-name="T13">將鄰居 </text:span><text:span text:style-name="T12">B</text:span><text:span text:style-name="T13">、</text:span><text:span text:style-name="T12">C </text:span><text:span text:style-name="T13">加入</text:span></text:p>
          </table:table-cell>
          <table:table-cell table:style-name="表格24.A3" office:value-type="string">
            <text:p text:style-name="P11" loext:marker-style-name="T92"><text:span text:style-name="T92">[ B, C ]</text:span><text:span text:style-name="T92"/></text:p>
          </table:table-cell>
          <table:table-cell table:style-name="表格24.A3" office:value-type="string">
            <text:p text:style-name="P11" loext:marker-style-name="T11"><text:span text:style-name="T12">{A,B,C}</text:span><text:span text:style-name="T11"/></text:p>
          </table:table-cell>
          <table:table-cell table:style-name="表格24.A3" office:value-type="string">
            <text:p text:style-name="P11" loext:marker-style-name="T11"><text:span text:style-name="T12">A</text:span><text:span text:style-name="T11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0"><text:span text:style-name="T93">②</text:span><text:span text:style-name="T90"/></text:p>
          </table:table-cell>
          <table:table-cell table:style-name="表格24.A2" office:value-type="string">
            <text:p text:style-name="P9" loext:marker-style-name="T11"><text:span text:style-name="T12">dequeue B → </text:span><text:span text:style-name="T13">輸出 </text:span><text:span text:style-name="T12">B </text:span><text:span text:style-name="T13">將鄰居 </text:span><text:span text:style-name="T12">D </text:span><text:span text:style-name="T13">加入（</text:span><text:span text:style-name="T12">A </text:span><text:span text:style-name="T13">已拜訪跳過）</text:span></text:p>
          </table:table-cell>
          <table:table-cell table:style-name="表格24.A2" office:value-type="string">
            <text:p text:style-name="P11" loext:marker-style-name="T92"><text:span text:style-name="T92">[ C, D ]</text:span><text:span text:style-name="T92"/></text:p>
          </table:table-cell>
          <table:table-cell table:style-name="表格24.A2" office:value-type="string">
            <text:p text:style-name="P11" loext:marker-style-name="T11"><text:span text:style-name="T12">{A,B,C,D}</text:span><text:span text:style-name="T11"/></text:p>
          </table:table-cell>
          <table:table-cell table:style-name="表格24.A2" office:value-type="string">
            <text:p text:style-name="P11" loext:marker-style-name="T11"><text:span text:style-name="T12">A B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0"><text:span text:style-name="T93">③</text:span><text:span text:style-name="T90"/></text:p>
          </table:table-cell>
          <table:table-cell table:style-name="表格24.A3" office:value-type="string">
            <text:p text:style-name="P9" loext:marker-style-name="T11"><text:span text:style-name="T12">dequeue C → </text:span><text:span text:style-name="T13">輸出 </text:span><text:span text:style-name="T12">C </text:span><text:span text:style-name="T13">將鄰居 </text:span><text:span text:style-name="T12">E </text:span><text:span text:style-name="T13">加入（</text:span><text:span text:style-name="T12">A </text:span><text:span text:style-name="T13">已拜訪跳過）</text:span></text:p>
          </table:table-cell>
          <table:table-cell table:style-name="表格24.A3" office:value-type="string">
            <text:p text:style-name="P11" loext:marker-style-name="T92"><text:span text:style-name="T92">[ D, E ]</text:span><text:span text:style-name="T92"/></text:p>
          </table:table-cell>
          <table:table-cell table:style-name="表格24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3" office:value-type="string">
            <text:p text:style-name="P11" loext:marker-style-name="T11"><text:span text:style-name="T12">A B C</text:span><text:span text:style-name="T11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0"><text:span text:style-name="T93">④</text:span><text:span text:style-name="T90"/></text:p>
          </table:table-cell>
          <table:table-cell table:style-name="表格24.A2" office:value-type="string">
            <text:p text:style-name="P9" loext:marker-style-name="T11"><text:span text:style-name="T12">dequeue D → </text:span><text:span text:style-name="T13">輸出 </text:span><text:span text:style-name="T12">D </text:span><text:span text:style-name="T13">無未拜訪鄰居</text:span></text:p>
          </table:table-cell>
          <table:table-cell table:style-name="表格24.A2" office:value-type="string">
            <text:p text:style-name="P11" loext:marker-style-name="T92"><text:span text:style-name="T92">[ E ]</text:span><text:span text:style-name="T92"/></text:p>
          </table:table-cell>
          <table:table-cell table:style-name="表格24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2" office:value-type="string">
            <text:p text:style-name="P11" loext:marker-style-name="T11"><text:span text:style-name="T12">A B C D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0"><text:span text:style-name="T93">⑤</text:span><text:span text:style-name="T90"/></text:p>
          </table:table-cell>
          <table:table-cell table:style-name="表格24.A3" office:value-type="string">
            <text:p text:style-name="P9" loext:marker-style-name="T11"><text:span text:style-name="T12">dequeue E → </text:span><text:span text:style-name="T13">輸出 </text:span><text:span text:style-name="T12">E </text:span><text:span text:style-name="T13">無未拜訪鄰居</text:span></text:p>
          </table:table-cell>
          <table:table-cell table:style-name="表格24.A3" office:value-type="string">
            <text:p text:style-name="P11" loext:marker-style-name="T92"><text:span text:style-name="T92">[ ]（空）</text:span><text:span text:style-name="T92"/></text:p>
          </table:table-cell>
          <table:table-cell table:style-name="表格24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3" office:value-type="string">
            <text:p text:style-name="P11" loext:marker-style-name="T76"><text:span text:style-name="T77">A B C D E</text:span><text:span text:style-name="T76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</text:span><text:span text:style-name="T15">Queue </text:span><text:span text:style-name="T1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8" loext:marker-style-name="T18"><text:span text:style-name="T18"><text:s text:c="2"/>FIFO（先進先出）的特性：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第 1 層的 B、C 先進 Queue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第 2 層的 D、E 後進 Queue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Queue: [ B, C, D, E ]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11"/>↑ <text:s text:c="10"/>← dequeue 從這端取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9"/>B 先出 → C 先出 → D 先出 → E 先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B、C（第 1 層）一定比 D、E（第 2 層）先被取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→ 保證層次順序！這就是「廣度優先」的核心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3-3 BFS </text:span><text:span text:style-name="T29">時間與空間複雜度推導</text:span></text:h>
      <text:p text:style-name="P7" loext:marker-style-name="T14"><text:span text:style-name="T15"><text:s text:c="2"/>▎ </text:span><text:span text:style-name="T16">時間複雜度：</text:span><text:span text:style-name="T38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94">每個頂點最多被 enqueue / dequeue 一次</text:span><text:span text:style-name="T18"> <text:s/>→ </text:span><text:span text:style-name="T95">O(V)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47">每條邊在處理時最多被檢查兩次（兩端各一）</text:span><text:span text:style-name="T18">→ </text:span><text:span text:style-name="T96">O(E)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總計：</text:span><text:span text:style-name="T39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8"/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範例：</text:span><text:span text:style-name="T36">V=5，E=4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50">時間複雜度與 V+E 成正比</text:span><text:span text:style-name="T18">，此圖規模為 O(5+4) = O(9) （非常有效率）</text:span></text:p>
          </table:table-cell>
        </table:table-row>
      </table:table>
      <text:p text:style-name="P7" loext:marker-style-name="T14"><text:span text:style-name="T15"><text:s text:c="2"/>▎ </text:span><text:span text:style-name="T16">空間複雜度：</text:span><text:span text:style-name="T38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text:span text:style-name="T52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8"/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text:span text:style-name="T94">最壞情況下</text:span><text:span text:style-name="T18">，</text:span><text:span text:style-name="T45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（例如</text:span><text:span text:style-name="T36">星形圖中</text:span><text:span text:style-name="T18">，</text:span><text:span text:style-name="T47">處理中心頂點後，其餘 V−1 個頂點同時進入 Queue</text:span><text:span text:style-name="T18">）</text:span></text:p>
          </table:table-cell>
        </table:table-row>
        <table:table-row table:style-name="表格27.1">
          <table:table-cell table:style-name="表格27.A1" office:value-type="string">
            <text:p text:style-name="P12"/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因此 </text:span><text:span text:style-name="T36">Queue 所需空間為</text:span><text:span text:style-name="T18"> </text:span><text:span text:style-name="T95">O(V)</text:span><text:span text:style-name="T18">。</text:span></text:p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3" loext:marker-style-name="T18"><text:s text:c="2"/>另需 <text:span text:style-name="T97">visited 陣列記錄已拜訪頂點</text:span> → <text:span text:style-name="T98">O(V)</text:span></text:p>
          </table:table-cell>
        </table:table-row>
        <table:table-row table:style-name="表格27.1">
          <table:table-cell table:style-name="表格27.A8" office:value-type="string">
            <text:p text:style-name="P13" loext:marker-style-name="T18"/>
          </table:table-cell>
        </table:table-row>
        <table:table-row table:style-name="表格27.1">
          <table:table-cell table:style-name="表格27.A8" office:value-type="string">
            <text:p text:style-name="P13" loext:marker-style-name="T18"><text:s text:c="2"/><text:span text:style-name="T99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3" loext:marker-style-name="T18"><text:s text:c="2"/><text:span text:style-name="T99">O(V)+O(V)=O(V)</text:span></text:p>
          </table:table-cell>
        </table:table-row>
      </table:table>
      <text:p text:style-name="P14" loext:marker-style-name="T100"><text:span text:style-name="T100"><text:s text:c="2"/>▎ ⚠ 重要前提：</text:span><text:span text:style-name="T101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5" loext:marker-style-name="T102"><text:span text:style-name="T103"><text:s text:c="2"/>上述 </text:span><text:span text:style-name="T64">BFS / DFS 的 O(V+E)是建立在 Graph 採用 Adjacency List或 Adjacency Multilist 儲存的情況下，再配合 Queue 來完成搜尋</text:span><text:span text:style-name="T103">。</text:span></text:p>
            <text:p text:style-name="P15" loext:marker-style-name="T102"><text:span text:style-name="T103"><text:s text:c="2"/>若 Graph 採用 Adjacency Matrix，</text:span><text:span text:style-name="T47">若使用 Adjacency Matrix</text:span><text:span text:style-name="T102">，每處理一個頂點需掃描整列（O(V)）找鄰居，共 V 個頂點 × O(V) = O(V²)，</text:span><text:span text:style-name="T47">時間複雜度為 O(V²)，而非 O(V+E)</text:span><text:span text:style-name="T102">。</text:span></text:p>
            <text:p text:style-name="P16" loext:marker-style-name="T103"><text:span text:style-name="T103"/></text:p>
            <text:p text:style-name="P16" loext:marker-style-name="T103"><text:span text:style-name="T103">【一句話結論】</text:span></text:p>
            <text:p text:style-name="P16" loext:marker-style-name="T103"><text:span text:style-name="T41">BFS 的 O(V+E) 成立，是因為 Graph 採用 Adjacency List</text:span><text:span text:style-name="T103">（或 Adjacency Multilist）</text:span><text:span text:style-name="T41">儲存</text:span><text:span text:style-name="T103">的前下，</text:span><text:span text:style-name="T56">BFS 的執行過程幾乎等同於「依序</text:span><text:span text:style-name="T67">掃描每個頂點的 Adjacency List 一遍</text:span><text:span text:style-name="T56">」，</text:span><text:span text:style-name="T104">再配合 Queue 來完成搜尋</text:span><text:span text:style-name="T103">。</text:span></text:p>
          </table:table-cell>
        </table:table-row>
      </table:table>
      <text:p text:style-name="Standard"/>
      <text:p text:style-name="P1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8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19"><text:span text:style-name="T105">BFS</text:span> 是<text:span text:style-name="T106">「演算法」（圖怎麼走）</text:span></text:p>
            <text:p text:style-name="P20"><text:span text:style-name="T107">Adjacency List</text:span> 是<text:span text:style-name="T108">「儲存方式」（圖怎麼存）</text:span></text:p>
            <text:p text:style-name="P21">兩者概念不同，但在實作上緊密結合。</text:p>
            <text:p text:style-name="P22"/>
            <text:p text:style-name="P21">BFS 虛擬碼：</text:p>
            <text:p text:style-name="P22"/>
            <text:p text:style-name="P21"><text:s text:c="2"/>while (<text:span text:style-name="T109">!Q.empty()</text:span>) {</text:p>
            <text:p text:style-name="P21"><text:s text:c="5"/><text:span text:style-name="T109"><text:s/>u = Q.front()</text:span>;</text:p>
            <text:p text:style-name="P22"><text:soft-page-break/><text:span text:style-name="T110"><text:s text:c="5"/></text:span><text:span text:style-name="T111"><text:s/>Q.pop()</text:span><text:span text:style-name="T110">;</text:span></text:p>
            <text:p text:style-name="P21"><text:s text:c="6"/>for (<text:span text:style-name="T97">each neighbor v of u</text:span>) { <text:s text:c="2"/>← 這一行！</text:p>
            <text:p text:style-name="P21"><text:s text:c="10"/>if (<text:span text:style-name="T112">!visited[v]</text:span>) {</text:p>
            <text:p text:style-name="P21"><text:s text:c="14"/>visited[v] = true;</text:p>
            <text:p text:style-name="P21"><text:s text:c="14"/><text:span text:style-name="T113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22"/>
            <text:p text:style-name="P21"><text:span text:style-name="T114">「for (each neighbor v of u)」實際上就是</text:span>：</text:p>
            <text:p text:style-name="P21">→ <text:span text:style-name="T115">掃描 u 的 Adjacency List 中每一個鄰居節點</text:span></text:p>
            <text:p text:style-name="P22"/>
            <text:p text:style-name="P21">因此，<text:span text:style-name="T116">BFS 的整體執行過程</text:span> =</text:p>
            <text:p text:style-name="P23"><text:span text:style-name="T117">Queue（管理拜訪順序）</text:span>+ 不停掃描各頂點的 Adjacency List</text:p>
          </table:table-cell>
        </table:table-row>
      </table:table>
      <text:p text:style-name="P17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8">▎ 用<text:span text:style-name="T109">同一張圖</text:span>，<text:span text:style-name="T118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22"/>
            <text:p text:style-name="P20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24"/>
            <text:p text:style-name="P19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22"/>
            <text:p text:style-name="P21">觀察：<text:span text:style-name="T114">BFS 執行一遍</text:span>，<text:span text:style-name="T119">恰好把 A、B、C、D、E 的 Adjacency List</text:span></text:p>
            <text:p text:style-name="P23">全部從頭到尾各掃描了一次！</text:p>
          </table:table-cell>
        </table:table-row>
      </table:table>
      <text:p text:style-name="P17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<text:span text:style-name="T97">每個頂點最多進出 Queue 一次</text:span></text:p>
            <text:p text:style-name="P21"><text:span text:style-name="T97"><text:s text:c="2"/>→ 共 V 個頂點</text:span> → <text:span text:style-name="T115">O(V)</text:span></text:p>
            <text:p text:style-name="P22"/>
            <text:p text:style-name="P21">O(E) 的來源（本質！）：</text:p>
            <text:p text:style-name="P21"><text:s text:c="2"/><text:span text:style-name="T97">所有 Adjacency List 中的鄰居節點，加起來總共有 2E 個</text:span></text:p>
            <text:p text:style-name="P21"><text:s text:c="2"/>（<text:span text:style-name="T120">每條邊出現在兩個頂點的串列各一次</text:span>）</text:p>
            <text:p text:style-name="P21"><text:s text:c="2"/><text:span text:style-name="T121">BFS 把它們全部掃描了一遍 → O(2E) = O(E</text:span><text:span text:style-name="T122">)</text:span></text:p>
            <text:p text:style-name="P22"/>
            <text:p text:style-name="P21">合計：<text:span text:style-name="T115">O(V) + O(E) = O(V + E)</text:span></text:p>
            <text:p text:style-name="P22"/>
            <text:p text:style-name="P21">口訣：</text:p>
            <text:p text:style-name="P25">O(V) = 每個頂點進出 Queue 一次</text:p>
            <text:p text:style-name="P23">O(E) = 所有 Adjacency List 被掃描一遍</text:p>
          </table:table-cell>
        </table:table-row>
      </table:table>
      <text:p text:style-name="P17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8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22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22"><text:soft-page-break/><text:span text:style-name="T110"><text:s text:c="2"/>D[ 0 <text:s/>1 <text:s/>0 <text:s/>0 ]</text:span></text:p>
            <text:p text:style-name="P22"/>
            <text:p text:style-name="P26">BFS 處理頂點 A 時，不再是走一條短短的 Adjacency List，</text:p>
            <text:p text:style-name="P21"><text:span text:style-name="T98">而是必須掃描矩陣整列</text:span>：</text:p>
            <text:p text:style-name="P22"/>
            <text:p text:style-name="P21"><text:s text:c="2"/>matrix[A][0] → matrix[A][1] → matrix[A][2] → matrix[A][3]</text:p>
            <text:p text:style-name="P22"/>
            <text:p text:style-name="P27">無論這一列有幾個 1，都要掃完整的 V 格 → O(V)</text:p>
            <text:p text:style-name="P22"/>
            <text:p text:style-name="P21">V 個頂點都這樣做：V × O(V) = O(V²)</text:p>
            <text:p text:style-name="P22"/>
            <text:p text:style-name="P21">這就是為什麼<text:span text:style-name="T115">改用 Matrix，BFS 時間就從 O(V+E) 變成 O(V²)</text:span>。</text:p>
          </table:table-cell>
        </table:table-row>
      </table:table>
      <text:p text:style-name="P17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18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8">表示法</text:p>
          </table:table-cell>
          <table:table-cell table:style-name="表格58.A2" office:value-type="string">
            <text:p text:style-name="P28">BFS 時間</text:p>
          </table:table-cell>
          <table:table-cell table:style-name="表格58.A2" office:value-type="string">
            <text:p text:style-name="P28">DFS 時間</text:p>
          </table:table-cell>
          <table:table-cell table:style-name="表格58.A2" office:value-type="string">
            <text:p text:style-name="P28">原因</text:p>
          </table:table-cell>
        </table:table-row>
        <table:table-row table:style-name="表格58.1">
          <table:table-cell table:style-name="表格58.A3" office:value-type="string">
            <text:p text:style-name="P29">Adjacency Matrix</text:p>
          </table:table-cell>
          <table:table-cell table:style-name="表格58.A3" office:value-type="string">
            <text:p text:style-name="P29">O(V²)</text:p>
          </table:table-cell>
          <table:table-cell table:style-name="表格58.A3" office:value-type="string">
            <text:p text:style-name="P29">O(V²)</text:p>
          </table:table-cell>
          <table:table-cell table:style-name="表格58.A3" office:value-type="string">
            <text:p text:style-name="P29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9">Adjacency List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9">Adjacency Multilist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<text:span text:style-name="T123">同 List</text:span>，<text:span text:style-name="T124">邊節點只存一份但邏輯等價</text:span></text:p>
          </table:table-cell>
        </table:table-row>
      </table:table>
      <text:p text:style-name="P17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<text:span text:style-name="T116">「BFS 時間複雜度 O(V+E)」，</text:span></text:p>
            <text:p text:style-name="P21"><text:span text:style-name="T116"><text:s text:c="3"/>預設前提是 Graph 採用 Adjacency List 或 Adjacency Multilist 儲存，再配合 Queue 來完成搜尋</text:span>。</text:p>
            <text:p text:style-name="P21"><text:s text:c="3"/><text:span text:style-name="T125">若題目明確說明使用 Adjacency Matrix，則答案改為 O(V²)</text:span>。</text:p>
            <text:p text:style-name="P21"><text:s text:c="3"/>兩種情況都是公職考試常出現的細節，務必區分！</text:p>
          </table:table-cell>
        </table:table-row>
      </table:table>
      <text:p text:style-name="P17"/>
      <text:h text:style-name="P4" text:outline-level="1" loext:marker-style-name="T9"><text:span text:style-name="T10">四、</text:span><text:span text:style-name="T9">DFS</text:span><text:span text:style-name="T10">（深度優先搜尋）─ 含完整圖解</text:span></text:h>
      <text:p text:style-name="P5" loext:marker-style-name="T11"><text:span text:style-name="T12">Depth-First Search</text:span><text:span text:style-name="T13">｜</text:span><text:span text:style-name="T24">使用 </text:span><text:span text:style-name="T25">Stack</text:span><text:span text:style-name="T13">（</text:span><text:span text:style-name="T12">LIFO </text:span><text:span text:style-name="T13">堆疊）</text:span></text:p>
      <text:p text:style-name="P6"/>
      <text:h text:style-name="P10" text:outline-level="2" loext:marker-style-name="T28"><text:span text:style-name="T28">4-1 </text:span><text:span text:style-name="T29">核心概念圖解</text:span></text:h>
      <text:p text:style-name="P7" loext:marker-style-name="T14"><text:span text:style-name="T15"><text:s text:c="2"/>▎ </text:span><text:span text:style-name="T1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" loext:marker-style-name="T18"><text:span text:style-name="T18"><text:s text:c="2"/>同一張圖：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9"/>A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7"/>/ <text:s text:c="2"/>\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5"/>B <text:s text:c="6"/>C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4"/>/ \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3"/>D <text:s text:c="2"/>E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DFS 從 A 出發，先一路衝到底：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A → B（往深處走）→ </text:span><text:span text:style-name="T47">D（繼續往深處）→ 無路了，退回</text:span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→ </text:span><text:span text:style-name="T40">E（繼續往深處）→ 無路了，退回</text:span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→ </text:span><text:span text:style-name="T52">退回 A → C（A 的另一個鄰居）</text:span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輸出順序：A → B → D → E → C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比喻：走迷宮，</text:span><text:span text:style-name="T50">一條路走到底，</text:span><text:span text:style-name="T126">死路才退回</text:span></text:p>
          </table:table-cell>
        </table:table-row>
      </table:table>
      <text:p text:style-name="P6"/>
      <text:h text:style-name="P10" text:outline-level="2" loext:marker-style-name="T28"><text:span text:style-name="T28">4-2 DFS </text:span><text:span text:style-name="T29">逐步追蹤（用 </text:span><text:span text:style-name="T28">Stack </text:span><text:span text:style-name="T29">詳細步驟）</text:span></text:h>
      <text:p text:style-name="P7" loext:marker-style-name="T14"><text:span text:style-name="T15"><text:s text:c="2"/>▎ </text:span><text:span text:style-name="T16">使用相同圖形，從 </text:span><text:span text:style-name="T15">A </text:span><text:span text:style-name="T16">開始 </text:span><text:span text:style-name="T15">DFS</text:span><text:span text:style-name="T1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1" loext:marker-style-name="T69"><text:span text:style-name="T70">步</text:span><text:span text:style-name="T69"/></text:p>
          </table:table-cell>
          <table:table-cell table:style-name="表格30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30.A1" office:value-type="string">
            <text:p text:style-name="P11" loext:marker-style-name="T69"><text:span text:style-name="T71">Stack </text:span><text:span text:style-name="T70">狀態（右</text:span><text:span text:style-name="T71">=</text:span><text:span text:style-name="T70">頂端）</text:span></text:p>
          </table:table-cell>
          <table:table-cell table:style-name="表格30.A1" office:value-type="string">
            <text:p text:style-name="P11" loext:marker-style-name="T69"><text:span text:style-name="T70">已拜訪</text:span><text:span text:style-name="T69"/></text:p>
          </table:table-cell>
          <table:table-cell table:style-name="表格30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0"><text:span text:style-name="T91">初始</text:span><text:span text:style-name="T90"/></text:p>
          </table:table-cell>
          <table:table-cell table:style-name="表格30.A2" office:value-type="string">
            <text:p text:style-name="P9" loext:marker-style-name="T11"><text:span text:style-name="T12">push </text:span><text:span text:style-name="T13">起點 </text:span><text:span text:style-name="T12">A</text:span></text:p>
          </table:table-cell>
          <table:table-cell table:style-name="表格30.A2" office:value-type="string">
            <text:p text:style-name="P11" loext:marker-style-name="T92"><text:span text:style-name="T92">[ A ]</text:span><text:span text:style-name="T92"/></text:p>
          </table:table-cell>
          <table:table-cell table:style-name="表格30.A2" office:value-type="string">
            <text:p text:style-name="P11" loext:marker-style-name="T11"><text:span text:style-name="T12">{A}</text:span><text:span text:style-name="T11"/></text:p>
          </table:table-cell>
          <table:table-cell table:style-name="表格30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0"><text:span text:style-name="T93">①</text:span><text:span text:style-name="T90"/></text:p>
          </table:table-cell>
          <table:table-cell table:style-name="表格30.A3" office:value-type="string">
            <text:p text:style-name="P9" loext:marker-style-name="T11"><text:span text:style-name="T12">pop A → </text:span><text:span text:style-name="T13">輸出 </text:span><text:span text:style-name="T12">A </text:span><text:span text:style-name="T127">push </text:span><text:span text:style-name="T31">鄰居 </text:span><text:span text:style-name="T127">C</text:span><text:span text:style-name="T31">、</text:span><text:span text:style-name="T127">B</text:span><text:span text:style-name="T13">（</text:span><text:span text:style-name="T128">C</text:span><text:span text:style-name="T129">先</text:span><text:span text:style-name="T128">push → B</text:span><text:span text:style-name="T129">後</text:span><text:span text:style-name="T128">push</text:span><text:span text:style-name="T13">，</text:span><text:span text:style-name="T130">B</text:span><text:span text:style-name="T131">先</text:span><text:span text:style-name="T130">pop</text:span><text:span text:style-name="T13">）</text:span></text:p>
          </table:table-cell>
          <table:table-cell table:style-name="表格30.A3" office:value-type="string">
            <text:p text:style-name="P11" loext:marker-style-name="T92"><text:span text:style-name="T92">[ C, B ] <text:s/>← </text:span><text:span text:style-name="T132">B在頂</text:span></text:p>
          </table:table-cell>
          <table:table-cell table:style-name="表格30.A3" office:value-type="string">
            <text:p text:style-name="P11" loext:marker-style-name="T11"><text:span text:style-name="T12">{A,B,C}</text:span><text:span text:style-name="T11"/></text:p>
          </table:table-cell>
          <table:table-cell table:style-name="表格30.A3" office:value-type="string">
            <text:p text:style-name="P11" loext:marker-style-name="T11"><text:span text:style-name="T12">A</text:span><text:span text:style-name="T11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0"><text:span text:style-name="T93">②</text:span><text:span text:style-name="T90"/></text:p>
          </table:table-cell>
          <table:table-cell table:style-name="表格30.A2" office:value-type="string">
            <text:p text:style-name="P9" loext:marker-style-name="T11"><text:span text:style-name="T12">pop B → </text:span><text:span text:style-name="T13">輸出 </text:span><text:span text:style-name="T12">B </text:span><text:span text:style-name="T133">push </text:span><text:span text:style-name="T134">鄰居 </text:span><text:span text:style-name="T133">E</text:span><text:span text:style-name="T134">、</text:span><text:span text:style-name="T133">D</text:span><text:span text:style-name="T13">（</text:span><text:span text:style-name="T130">D</text:span><text:span text:style-name="T131">在頂</text:span><text:span text:style-name="T13">）</text:span></text:p>
          </table:table-cell>
          <table:table-cell table:style-name="表格30.A2" office:value-type="string">
            <text:p text:style-name="P11" loext:marker-style-name="T92"><text:span text:style-name="T92">[ C, E, D ] <text:s/>← </text:span><text:span text:style-name="T132">D在頂</text:span></text:p>
          </table:table-cell>
          <table:table-cell table:style-name="表格30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2" office:value-type="string">
            <text:p text:style-name="P11" loext:marker-style-name="T11"><text:span text:style-name="T12">A B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0"><text:span text:style-name="T93">③</text:span><text:span text:style-name="T90"/></text:p>
          </table:table-cell>
          <table:table-cell table:style-name="表格30.A3" office:value-type="string">
            <text:p text:style-name="P9" loext:marker-style-name="T11"><text:span text:style-name="T12">pop D → </text:span><text:span text:style-name="T134">輸出 </text:span><text:span text:style-name="T133">D </text:span><text:span text:style-name="T134">無未拜訪鄰居</text:span></text:p>
          </table:table-cell>
          <table:table-cell table:style-name="表格30.A3" office:value-type="string">
            <text:p text:style-name="P11" loext:marker-style-name="T92"><text:span text:style-name="T92">[ C, E ] <text:s/>← </text:span><text:span text:style-name="T132">E在頂</text:span></text:p>
          </table:table-cell>
          <table:table-cell table:style-name="表格30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3" office:value-type="string">
            <text:p text:style-name="P11" loext:marker-style-name="T11"><text:span text:style-name="T12">A B D</text:span><text:span text:style-name="T11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0"><text:span text:style-name="T93">④</text:span><text:span text:style-name="T90"/></text:p>
          </table:table-cell>
          <table:table-cell table:style-name="表格30.A2" office:value-type="string">
            <text:p text:style-name="P9" loext:marker-style-name="T11"><text:span text:style-name="T12">pop E → </text:span><text:span text:style-name="T134">輸出 </text:span><text:span text:style-name="T133">E </text:span><text:span text:style-name="T134">無未拜訪鄰居</text:span></text:p>
          </table:table-cell>
          <table:table-cell table:style-name="表格30.A2" office:value-type="string">
            <text:p text:style-name="P11" loext:marker-style-name="T92"><text:span text:style-name="T92">[ C ] <text:s/>← </text:span><text:span text:style-name="T132">C在頂</text:span></text:p>
          </table:table-cell>
          <table:table-cell table:style-name="表格30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2" office:value-type="string">
            <text:p text:style-name="P11" loext:marker-style-name="T11"><text:span text:style-name="T12">A B D E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0"><text:span text:style-name="T93">⑤</text:span><text:span text:style-name="T90"/></text:p>
          </table:table-cell>
          <table:table-cell table:style-name="表格30.A3" office:value-type="string">
            <text:p text:style-name="P9" loext:marker-style-name="T11"><text:span text:style-name="T12">pop C →</text:span><text:span text:style-name="T133"> </text:span><text:span text:style-name="T134">輸出 </text:span><text:span text:style-name="T133">C </text:span><text:span text:style-name="T134">無未拜訪鄰居</text:span></text:p>
          </table:table-cell>
          <table:table-cell table:style-name="表格30.A3" office:value-type="string">
            <text:p text:style-name="P11" loext:marker-style-name="T92"><text:span text:style-name="T92">[ ]（空）</text:span><text:span text:style-name="T92"/></text:p>
          </table:table-cell>
          <table:table-cell table:style-name="表格30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3" office:value-type="string">
            <text:p text:style-name="P11" loext:marker-style-name="T76"><text:span text:style-name="T77">A B D E C</text:span><text:span text:style-name="T76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</text:span><text:span text:style-name="T15">Stack </text:span><text:span text:style-name="T1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" loext:marker-style-name="T18"><text:span text:style-name="T18"><text:s text:c="2"/>LIFO（後進先出）的特性：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/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從 A pop 出來後，</text:span><text:span text:style-name="T57">push B 和 C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59">Stack: [ C, B ] <text:s/>← B 在頂端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下一步 pop 出 B（不是 C！）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</text:span><text:span text:style-name="T39">優先往 B 的方向深入，而非切換到 C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這就是「深度優先」！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/>
          </table:table-cell>
        </table:table-row>
        <text:soft-page-break/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47">要等 B 這一支全部走完（pop 出 D、E）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20">Stack 才回到 C：[ C ]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這就是「Backtracking（回溯）」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4-3 DFS </text:span><text:span text:style-name="T29">時間與空間複雜度推導</text:span></text:h>
      <text:p text:style-name="P7" loext:marker-style-name="T14"><text:span text:style-name="T15"><text:s text:c="2"/>▎ </text:span><text:span text:style-name="T16">時間複雜度：</text:span><text:span text:style-name="T135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" loext:marker-style-name="T18"><text:span text:style-name="T18"><text:s text:c="2"/></text:span><text:span text:style-name="T36">每個頂點最多被 push / pop 一次</text:span><text:span text:style-name="T18"> <text:s/>→ </text:span><text:span text:style-name="T39">O(V)</text:span></text:p>
          </table:table-cell>
        </table:table-row>
        <table:table-row table:style-name="表格32.1">
          <table:table-cell table:style-name="表格32.A1" office:value-type="string">
            <text:p text:style-name="P8" loext:marker-style-name="T18"><text:span text:style-name="T18"><text:s text:c="2"/></text:span><text:span text:style-name="T51">每條邊在處理時被檢查兩次</text:span><text:span text:style-name="T18"> <text:s text:c="7"/>→ </text:span><text:span text:style-name="T39">O(E)</text:span></text:p>
          </table:table-cell>
        </table:table-row>
        <table:table-row table:style-name="表格32.1">
          <table:table-cell table:style-name="表格32.A1" office:value-type="string">
            <text:p text:style-name="P8" loext:marker-style-name="T18"><text:span text:style-name="T18"><text:s text:c="2"/>總計：</text:span><text:span text:style-name="T39">O(V + E)</text:span><text:span text:style-name="T18"> <text:s/>（和 BFS 相同）</text:span></text:p>
          </table:table-cell>
        </table:table-row>
      </table:table>
      <text:p text:style-name="P7" loext:marker-style-name="T14"><text:span text:style-name="T15"><text:s text:c="2"/>▎ </text:span><text:span text:style-name="T16">空間複雜度：</text:span><text:span text:style-name="T38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20">Stack 最多放多少頂點？</text:span></text:p>
          </table:table-cell>
        </table:table-row>
        <table:table-row table:style-name="表格33.1">
          <table:table-cell table:style-name="表格33.A1" office:value-type="string">
            <text:p text:style-name="P8"/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136">最壞情況（如星形圖：中心頂點 A 直接連接所有其他頂點）</text:span><text:span text:style-name="T18">：</text:span></text:p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47">從 A 出發，pop A 後，將鄰居 B、C、D...全部 push 進 Stack</text:span><text:span text:style-name="T18"> ，此時 </text:span><text:span text:style-name="T137">Stack 同時有 V-1 個待探索頂點</text:span></text:p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→ </text:span><text:span text:style-name="T39">O(V)</text:span></text:p>
          </table:table-cell>
        </table:table-row>
      </table:table>
      <text:p text:style-name="P14" loext:marker-style-name="T100"><text:span text:style-name="T100"><text:s text:c="2"/>▎ ⚠ 重要前提：O(V+E) 成立的條件（同 BFS）</text:span><text:span text:style-name="T100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5" loext:marker-style-name="T103"><text:span text:style-name="T103"><text:s text:c="2"/></text:span><text:span text:style-name="T138">DFS 的 O(V+E) 同樣以 Adjacency List 或 Multilist 為前提</text:span><text:span text:style-name="T103">。</text:span></text:p>
            <text:p text:style-name="P8" loext:marker-style-name="T102"><text:span text:style-name="T102"><text:s text:c="2"/></text:span><text:span text:style-name="T48">改用 Adjacency Matrix 時，每個頂點需掃描完整的一列才能找到所有鄰居，</text:span></text:p>
            <text:p text:style-name="P30" loext:marker-style-name="T102"><text:span text:style-name="T102"><text:s text:c="2"/></text:span><text:span text:style-name="T39">共 V 個頂點 × O(V) = O(V²)</text:span><text:span text:style-name="T102">。這是公職考試常考的細節，務必記住！</text:span></text:p>
          </table:table-cell>
        </table:table-row>
      </table:table>
      <text:h text:style-name="P10" text:outline-level="2" loext:marker-style-name="T28"><text:span text:style-name="T28">4-4 BFS vs DFS </text:span><text:span text:style-name="T29">核心差異</text:span></text:h>
      <text:p text:style-name="P7" loext:marker-style-name="T14"><text:span text:style-name="T15"><text:s text:c="2"/>▎ </text:span><text:span text:style-name="T1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 loext:marker-style-name="T18"><text:span text:style-name="T18"><text:s text:c="2"/>同一張圖：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7"/>1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5"/>/ <text:s text:c="2"/>\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4"/>2 <text:s text:c="4"/>3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3"/>/ \ <text:s text:c="2"/>/ \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2"/>4 <text:s text:c="2"/>5 6 <text:s text:c="2"/>7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/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</text:span><text:span text:style-name="T36">BFS</text:span><text:span text:style-name="T18"> 訪問順序（</text:span><text:span text:style-name="T139">Queue</text:span><text:span text:style-name="T18">）：</text:span><text:span text:style-name="T20">1, 2, 3, 4, 5, 6, 7</text:span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（一層一層橫向展開）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/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</text:span><text:span text:style-name="T36">DFS</text:span><text:span text:style-name="T18"> 訪問順序（</text:span><text:span text:style-name="T139">Stack</text:span><text:span text:style-name="T18">）：</text:span><text:span text:style-name="T20">1, 2, 4, 5, 3, 6, 7</text:span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（沿著一條路衝到底，再回頭）</text:span><text:span text:style-name="T18"/></text:p>
          </table:table-cell>
        </table:table-row>
      </table:table>
      <text:p text:style-name="P6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9" loext:marker-style-name="T69"><text:span text:style-name="T70">項目</text:span><text:span text:style-name="T69"/></text:p>
          </table:table-cell>
          <table:table-cell table:style-name="表格36.A1" office:value-type="string">
            <text:p text:style-name="P31"><text:span text:style-name="T140">BFS</text:span><text:span text:style-name="T141">（廣度優先）</text:span></text:p>
          </table:table-cell>
          <table:table-cell table:style-name="表格36.A1" office:value-type="string">
            <text:p text:style-name="P32"><text:span text:style-name="T140">DFS</text:span><text:span text:style-name="T141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資料結構</text:span><text:span text:style-name="T72"/></text:p>
          </table:table-cell>
          <table:table-cell table:style-name="表格36.B2" office:value-type="string">
            <text:p text:style-name="P31"><text:span text:style-name="T140">Queue</text:span><text:span text:style-name="T141">（先進先出）</text:span></text:p>
          </table:table-cell>
          <table:table-cell table:style-name="表格36.C2" office:value-type="string">
            <text:p text:style-name="P32"><text:span text:style-name="T140">Stack</text:span><text:span text:style-name="T141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9" loext:marker-style-name="T72"><text:span text:style-name="T73">記憶口訣</text:span><text:span text:style-name="T72"/></text:p>
          </table:table-cell>
          <table:table-cell table:style-name="表格36.B3" office:value-type="string">
            <text:p text:style-name="P11" loext:marker-style-name="T142"><text:span text:style-name="T143">B → Q</text:span><text:span text:style-name="T142"/></text:p>
          </table:table-cell>
          <table:table-cell table:style-name="表格36.B3" office:value-type="string">
            <text:p text:style-name="P11" loext:marker-style-name="T142"><text:span text:style-name="T143">D → S</text:span><text:span text:style-name="T142"/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探索方向</text:span><text:span text:style-name="T72"/></text:p>
          </table:table-cell>
          <table:table-cell table:style-name="表格36.A3" office:value-type="string">
            <text:p text:style-name="P11" loext:marker-style-name="T11"><text:span text:style-name="T13">橫向（層次展開）</text:span><text:span text:style-name="T11"/></text:p>
          </table:table-cell>
          <table:table-cell table:style-name="表格36.A3" office:value-type="string">
            <text:p text:style-name="P11" loext:marker-style-name="T11"><text:span text:style-name="T13">縱向（深入到底）</text:span><text:span text:style-name="T11"/></text:p>
          </table:table-cell>
        </table:table-row>
        <table:table-row table:style-name="表格36.1">
          <table:table-cell table:style-name="表格36.A3" office:value-type="string">
            <text:p text:style-name="P9" loext:marker-style-name="T72"><text:span text:style-name="T73">時間複雜度</text:span><text:span text:style-name="T72"/></text:p>
          </table:table-cell>
          <table:table-cell table:style-name="表格36.B5" office:value-type="string">
            <text:p text:style-name="P11" loext:marker-style-name="T144"><text:span text:style-name="T145">O(V+E)</text:span><text:span text:style-name="T144"/></text:p>
          </table:table-cell>
          <table:table-cell table:style-name="表格36.B5" office:value-type="string">
            <text:p text:style-name="P11" loext:marker-style-name="T144"><text:span text:style-name="T145">O(V+E)</text:span><text:span text:style-name="T144"/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空間複雜度</text:span><text:span text:style-name="T72"/></text:p>
          </table:table-cell>
          <table:table-cell table:style-name="表格36.A2" office:value-type="string">
            <text:p text:style-name="P11" loext:marker-style-name="T11"><text:span text:style-name="T12">O(V)</text:span><text:span text:style-name="T11"/></text:p>
          </table:table-cell>
          <table:table-cell table:style-name="表格36.A2" office:value-type="string">
            <text:p text:style-name="P11" loext:marker-style-name="T11"><text:span text:style-name="T12">O(V)</text:span><text:span text:style-name="T11"/></text:p>
          </table:table-cell>
        </table:table-row>
      </table:table>
      <text:p text:style-name="Standard"/>
      <text:h text:style-name="P4" text:outline-level="1" loext:marker-style-name="T9"><text:span text:style-name="T10">五、</text:span><text:span text:style-name="T9">Topological Sort（拓樸排序）─ 含完整圖解</text:span></text:h>
      <text:p text:style-name="P6"/>
      <text:p text:style-name="P5" loext:marker-style-name="T11"><text:span text:style-name="T12">Kahn's Algorithm</text:span><text:span text:style-name="T13">｜使用 </text:span><text:span text:style-name="T25">Queue</text:span><text:span text:style-name="T13">（FIFO 佇列）｜前提：圖必須是 </text:span><text:span text:style-name="T12">DAG</text:span></text:p>
      <text:p text:style-name="P6"/>
      <text:h text:style-name="P10" text:outline-level="2" loext:marker-style-name="T28"><text:span text:style-name="T28">5-1 </text:span><text:span text:style-name="T29">什麼是拓樸排序？</text:span></text:h>
      <text:p text:style-name="P7" loext:marker-style-name="T14"><text:span text:style-name="T15"><text:s text:c="2"/>▎ </text:span><text:span text:style-name="T16">核心概念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" loext:marker-style-name="T18"><text:span text:style-name="T18">拓樸排序 = 把一個 DAG（有向無環圖）的所有頂點，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排成一條直線，使得每一條有向邊 u → v，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u 都排在 v 的前面。</text:span></text:p>
          </table:table-cell>
        </table:table-row>
        <table:table-row table:style-name="表格37.1">
          <table:table-cell table:style-name="表格37.A1" office:value-type="string">
            <text:p text:style-name="P8"/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直覺理解：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給你一堆「任務」，每個任務有前置需求，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拓樸排序就是找出一個合法的完成順序。</text:span></text:p>
          </table:table-cell>
        </table:table-row>
        <table:table-row table:style-name="表格37.1">
          <table:table-cell table:style-name="表格37.A1" office:value-type="string">
            <text:p text:style-name="P8"/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關鍵限制：DAG 才能拓樸排序。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只要圖中有 Cycle（環），就永遠找不到合法順序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生活例子：穿衣服的順序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8" loext:marker-style-name="T18"><text:span text:style-name="T18">有向圖（箭頭 = 必須先做）：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內衣 ──→ 穿襯衫 ──→ 穿外套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內褲 ──→ 穿褲子 ──→ 穿皮帶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襪子 ──→ 穿鞋子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合法排序之一：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內衣 → 穿內褲 → 穿襪子 → 穿襯衫 → 穿褲子 → 穿皮帶 → 穿外套 → 穿鞋子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不合法的排序：先穿外套再穿襯衫 → 違反依賴關係！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注意：合法的拓樸排序不唯一，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只要所有依賴關係都被滿足，就是一個有效的排序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修課系統例子（考試最常用）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8" loext:marker-style-name="T18"><text:span text:style-name="T18">節點代表課程，有向邊代表先修關係（A→B 代表要先修 A 才能選 B）：</text:span></text:p>
          </table:table-cell>
        </table:table-row>
        <table:table-row table:style-name="表格45.1">
          <table:table-cell table:style-name="表格45.A1" office:value-type="string">
            <text:p text:style-name="P8"/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數學(M) ──→ 線代(L) ──→ 機器學習(ML)</text:span></text:p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│</text:span></text:p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統計(S) ──→ 機率(P) ──→ 機器學習(ML)</text:span></text:p>
          </table:table-cell>
        </table:table-row>
        <table:table-row table:style-name="表格45.1">
          <table:table-cell table:style-name="表格45.A1" office:value-type="string">
            <text:p text:style-name="P8"/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問：有沒有合法的修課順序？有的話是哪些？</text:span></text:p>
          </table:table-cell>
        </table:table-row>
        <table:table-row table:style-name="表格45.1">
          <table:table-cell table:style-name="表格45.A1" office:value-type="string">
            <text:p text:style-name="P8"/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這就是 Topological Sort 要解決的問題。</text:span></text:p>
          </table:table-cell>
        </table:table-row>
      </table:table>
      <text:p text:style-name="P6"/>
      <text:h text:style-name="P10" text:outline-level="2" loext:marker-style-name="T28"><text:span text:style-name="T28">5-2 </text:span><text:span text:style-name="T29">In-degree 圖解與計算</text:span></text:h>
      <text:p text:style-name="P7" loext:marker-style-name="T14"><text:span text:style-name="T15"><text:s text:c="2"/>▎ </text:span><text:span text:style-name="T16">什麼是 in-degree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 loext:marker-style-name="T18"><text:span text:style-name="T18">in-degree（入度）= 指向某頂點的有向邊數量</text:span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圖形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① ──────────→ ④</text:span></text:p>
          </table:table-cell>
        </table:table-row>
        <text:soft-page-break/>
        <table:table-row table:style-name="表格38.1">
          <table:table-cell table:style-name="表格38.A1" office:value-type="string">
            <text:p text:style-name="P8" loext:marker-style-name="T18"><text:span text:style-name="T18">① ──→ ③ ──→ ④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② ──────────→ ③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② ──→ ④</text:span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計算各頂點 in-degree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① = 0 （沒有任何箭頭指向 ①）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② = 0 （沒有任何箭頭指向 ②）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③ = 2 （① 和 ② 都指向 ③）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④ = 3 （①、② 和 ③ 都指向 ④）</text:span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結論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in-degree = 0 → 沒有「前置任務」→ 可以立刻開始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in-degree &gt; 0 → 還有未完成的前置任務，還不能做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in-degree=0 的頂點就是下一個可以輸出的？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8" loext:marker-style-name="T18"><text:span text:style-name="T18">in-degree=0 的頂點，代表：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→ 所有指向它的邊（= 它的前置工作）都已完成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→ 它已經沒有任何等待的依賴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→ 可以安全地排到輸出序列中</text:span></text:p>
          </table:table-cell>
        </table:table-row>
        <table:table-row table:style-name="表格47.1">
          <table:table-cell table:style-name="表格47.A1" office:value-type="string">
            <text:p text:style-name="P8"/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輸出它之後，它所「連出去」的後繼頂點，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因為少了一條「等待中」的依賴，in-degree 各自減 1。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若某後繼頂點的 in-degree 降為 0，它也可以被排出了。</text:span></text:p>
          </table:table-cell>
        </table:table-row>
        <table:table-row table:style-name="表格47.1">
          <table:table-cell table:style-name="表格47.A1" office:value-type="string">
            <text:p text:style-name="P8"/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這就是 Kahn's Algorithm 的核心邏輯。</text:span></text:p>
          </table:table-cell>
        </table:table-row>
      </table:table>
      <text:p text:style-name="P6"/>
      <text:h text:style-name="P10" text:outline-level="2" loext:marker-style-name="T28"><text:span text:style-name="T28">5-3 </text:span><text:span text:style-name="T29">Kahn's Algorithm 完整步驟與圖解</text:span></text:h>
      <text:p text:style-name="P7" loext:marker-style-name="T14"><text:span text:style-name="T15"><text:s text:c="2"/>▎ </text:span><text:span text:style-name="T16">演算法步驟（虛擬碼）</text:span></text:p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8" loext:marker-style-name="T18"><text:span text:style-name="T18">① 計算所有頂點的 in-degree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② 將所有 in-degree = 0 的頂點放入 Queue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③ while Queue 不為空：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取出頂點 u → 加入輸出序列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for 每個 u 的後繼頂點 v：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in-degree[v] -= 1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if in-degree[v] == 0：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將 v 加入 Queue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④ 若輸出序列長度 &lt; V → 代表圖中有 Cycle，排序失敗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使用圖形：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" loext:marker-style-name="T18"><text:span text:style-name="T18">數學(M) ──→ 線代(L) ──→ 機器學習(ML)</text:span></text:p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│</text:span></text:p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統計(S) ──→ 機率(P) ──→ 機器學習(ML)</text:span></text:p>
          </table:table-cell>
        </table:table-row>
        <table:table-row table:style-name="表格39.1">
          <table:table-cell table:style-name="表格39.A1" office:value-type="string">
            <text:p text:style-name="P8"/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初始 in-degree：M=0 S=0 L=1 P=1 ML=2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每一步驟狀態追蹤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11" loext:marker-style-name="T69"><text:span text:style-name="T70">步</text:span></text:p>
          </table:table-cell>
          <table:table-cell table:style-name="表格44.A1" office:value-type="string">
            <text:p text:style-name="P11" loext:marker-style-name="T69"><text:span text:style-name="T70">動作</text:span></text:p>
          </table:table-cell>
          <table:table-cell table:style-name="表格44.A1" office:value-type="string">
            <text:p text:style-name="P11" loext:marker-style-name="T69"><text:span text:style-name="T70">各頂點 in-degree</text:span></text:p>
          </table:table-cell>
          <table:table-cell table:style-name="表格44.A1" office:value-type="string">
            <text:p text:style-name="P11" loext:marker-style-name="T69"><text:span text:style-name="T70">Queue</text:span></text:p>
          </table:table-cell>
          <table:table-cell table:style-name="表格44.A1" office:value-type="string">
            <text:p text:style-name="P11" loext:marker-style-name="T69"><text:span text:style-name="T70">輸出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初始</text:span></text:p>
          </table:table-cell>
          <table:table-cell table:style-name="表格44.A2" office:value-type="string">
            <text:p text:style-name="P8" loext:marker-style-name="T18"><text:span text:style-name="T18">計算所有 in-degree，將 in-degree=0 者放入 Queue</text:span></text:p>
          </table:table-cell>
          <table:table-cell table:style-name="表格44.A2" office:value-type="string">
            <text:p text:style-name="P8" loext:marker-style-name="T18"><text:span text:style-name="T18">M=0 S=0 L=1 P=1 ML=2</text:span></text:p>
          </table:table-cell>
          <table:table-cell table:style-name="表格44.A2" office:value-type="string">
            <text:p text:style-name="P8" loext:marker-style-name="T18"><text:span text:style-name="T18">[ M, S ]</text:span></text:p>
          </table:table-cell>
          <table:table-cell table:style-name="表格44.A2" office:value-type="string">
            <text:p text:style-name="P8" loext:marker-style-name="T18"><text:span text:style-name="T18">（空）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①</text:span></text:p>
          </table:table-cell>
          <table:table-cell table:style-name="表格44.A2" office:value-type="string">
            <text:p text:style-name="P8" loext:marker-style-name="T18"><text:span text:style-name="T18">取出 M → 輸出 M；刪除 M→L，L 的 </text:span><text:soft-page-break/><text:span text:style-name="T18">in-degree: 1→0 → L 加入 Queue</text:span></text:p>
          </table:table-cell>
          <table:table-cell table:style-name="表格44.A2" office:value-type="string">
            <text:p text:style-name="P8" loext:marker-style-name="T18"><text:span text:style-name="T18">M=✓ S=0 L=0 P=1 </text:span><text:soft-page-break/><text:span text:style-name="T18">ML=2</text:span></text:p>
          </table:table-cell>
          <table:table-cell table:style-name="表格44.A2" office:value-type="string">
            <text:p text:style-name="P8" loext:marker-style-name="T18"><text:span text:style-name="T18">[ S, L ]</text:span></text:p>
          </table:table-cell>
          <table:table-cell table:style-name="表格44.A2" office:value-type="string">
            <text:p text:style-name="P8" loext:marker-style-name="T18"><text:span text:style-name="T18">M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②</text:span></text:p>
          </table:table-cell>
          <table:table-cell table:style-name="表格44.A2" office:value-type="string">
            <text:p text:style-name="P8" loext:marker-style-name="T18"><text:span text:style-name="T18">取出 S → 輸出 S；刪除 S→P，P 的 in-degree: 1→0 → P 加入 Queue</text:span></text:p>
          </table:table-cell>
          <table:table-cell table:style-name="表格44.A2" office:value-type="string">
            <text:p text:style-name="P8" loext:marker-style-name="T18"><text:span text:style-name="T18">M=✓ S=✓ L=0 P=0 ML=2</text:span></text:p>
          </table:table-cell>
          <table:table-cell table:style-name="表格44.A2" office:value-type="string">
            <text:p text:style-name="P8" loext:marker-style-name="T18"><text:span text:style-name="T18">[ L, P ]</text:span></text:p>
          </table:table-cell>
          <table:table-cell table:style-name="表格44.A2" office:value-type="string">
            <text:p text:style-name="P8" loext:marker-style-name="T18"><text:span text:style-name="T18">M S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③</text:span></text:p>
          </table:table-cell>
          <table:table-cell table:style-name="表格44.A2" office:value-type="string">
            <text:p text:style-name="P8" loext:marker-style-name="T18"><text:span text:style-name="T18">取出 L → 輸出 L；刪除 L→ML，ML 的 in-degree: 2→1</text:span></text:p>
          </table:table-cell>
          <table:table-cell table:style-name="表格44.A2" office:value-type="string">
            <text:p text:style-name="P8" loext:marker-style-name="T18"><text:span text:style-name="T18">M=✓ S=✓ L=✓ P=0 ML=1</text:span></text:p>
          </table:table-cell>
          <table:table-cell table:style-name="表格44.A2" office:value-type="string">
            <text:p text:style-name="P8" loext:marker-style-name="T18"><text:span text:style-name="T18">[ P ]</text:span></text:p>
          </table:table-cell>
          <table:table-cell table:style-name="表格44.A2" office:value-type="string">
            <text:p text:style-name="P8" loext:marker-style-name="T18"><text:span text:style-name="T18">M S L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④</text:span></text:p>
          </table:table-cell>
          <table:table-cell table:style-name="表格44.A2" office:value-type="string">
            <text:p text:style-name="P8" loext:marker-style-name="T18"><text:span text:style-name="T18">取出 P → 輸出 P；刪除 P→ML，ML 的 in-degree: 1→0 → ML 加入 Queue</text:span></text:p>
          </table:table-cell>
          <table:table-cell table:style-name="表格44.A2" office:value-type="string">
            <text:p text:style-name="P8" loext:marker-style-name="T18"><text:span text:style-name="T18">M=✓ S=✓ L=✓ P=✓ ML=0</text:span></text:p>
          </table:table-cell>
          <table:table-cell table:style-name="表格44.A2" office:value-type="string">
            <text:p text:style-name="P8" loext:marker-style-name="T18"><text:span text:style-name="T18">[ ML ]</text:span></text:p>
          </table:table-cell>
          <table:table-cell table:style-name="表格44.A2" office:value-type="string">
            <text:p text:style-name="P8" loext:marker-style-name="T18"><text:span text:style-name="T18">M S L P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⑤</text:span></text:p>
          </table:table-cell>
          <table:table-cell table:style-name="表格44.A2" office:value-type="string">
            <text:p text:style-name="P8" loext:marker-style-name="T18"><text:span text:style-name="T18">取出 ML → 輸出 ML；無後繼節點，Queue 空</text:span></text:p>
          </table:table-cell>
          <table:table-cell table:style-name="表格44.A2" office:value-type="string">
            <text:p text:style-name="P8" loext:marker-style-name="T18"><text:span text:style-name="T18">全部 ✓</text:span></text:p>
          </table:table-cell>
          <table:table-cell table:style-name="表格44.A2" office:value-type="string">
            <text:p text:style-name="P8" loext:marker-style-name="T18"><text:span text:style-name="T18">[ ]（空）</text:span></text:p>
          </table:table-cell>
          <table:table-cell table:style-name="表格44.A2" office:value-type="string">
            <text:p text:style-name="P8" loext:marker-style-name="T18"><text:span text:style-name="T18">M S L P ML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逐步圖解：in-degree 如何變化</text:span></text:p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33"><text:span text:style-name="T110">初始狀態（箭頭代表邊，括號內是 in-degree）：</text:span></text:p>
          </table:table-cell>
        </table:table-row>
        <table:table-row table:style-name="表格40.1">
          <table:table-cell table:style-name="表格40.A1" office:value-type="string">
            <text:p text:style-name="P33"/>
          </table:table-cell>
        </table:table-row>
        <table:table-row table:style-name="表格40.1">
          <table:table-cell table:style-name="表格40.A1" office:value-type="string">
            <text:p text:style-name="P33"><text:span text:style-name="T110">M(0) ──→ L(1) ──→ ML(2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│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S(0) ──→ P(1) ──→ ML(2)</text:span></text:p>
          </table:table-cell>
        </table:table-row>
        <table:table-row table:style-name="表格40.1">
          <table:table-cell table:style-name="表格40.A1" office:value-type="string">
            <text:p text:style-name="P33"/>
          </table:table-cell>
        </table:table-row>
        <table:table-row table:style-name="表格40.1">
          <table:table-cell table:style-name="表格40.A1" office:value-type="string">
            <text:p text:style-name="P33"><text:span text:style-name="T110">步驟①：取出 M，刪除 M→L：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M(✓) L(0) ──→ ML(2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│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S(0) ──→ P(1) ──→ ML(2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→ L 的 in-degree 變 0，加入 Queue</text:span></text:p>
          </table:table-cell>
        </table:table-row>
        <table:table-row table:style-name="表格40.1">
          <table:table-cell table:style-name="表格40.A1" office:value-type="string">
            <text:p text:style-name="P33"/>
          </table:table-cell>
        </table:table-row>
        <table:table-row table:style-name="表格40.1">
          <table:table-cell table:style-name="表格40.A1" office:value-type="string">
            <text:p text:style-name="P33"><text:span text:style-name="T110">步驟②：取出 S，刪除 S→P：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L(0) ──→ ML(2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S(✓) P(0) ──→ ML(2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→ P 的 in-degree 變 0，加入 Queue</text:span></text:p>
          </table:table-cell>
        </table:table-row>
        <table:table-row table:style-name="表格40.1">
          <table:table-cell table:style-name="表格40.A1" office:value-type="string">
            <text:p text:style-name="P33"/>
          </table:table-cell>
        </table:table-row>
        <table:table-row table:style-name="表格40.1">
          <table:table-cell table:style-name="表格40.A1" office:value-type="string">
            <text:p text:style-name="P33"><text:span text:style-name="T110">步驟③：取出 L，刪除 L→ML：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ML(1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→ ML in-degree 只降到 1，還不能出 Queue</text:span></text:p>
          </table:table-cell>
        </table:table-row>
        <table:table-row table:style-name="表格40.1">
          <table:table-cell table:style-name="表格40.A1" office:value-type="string">
            <text:p text:style-name="P33"/>
          </table:table-cell>
        </table:table-row>
        <table:table-row table:style-name="表格40.1">
          <table:table-cell table:style-name="表格40.A1" office:value-type="string">
            <text:p text:style-name="P33"><text:span text:style-name="T110">步驟④：取出 P，刪除 P→ML：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ML(0)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→ ML in-degree 降到 0，加入 Queue</text:span></text:p>
          </table:table-cell>
        </table:table-row>
        <table:table-row table:style-name="表格40.1">
          <table:table-cell table:style-name="表格40.A1" office:value-type="string">
            <text:p text:style-name="P33"/>
          </table:table-cell>
        </table:table-row>
        <table:table-row table:style-name="表格40.1">
          <table:table-cell table:style-name="表格40.A1" office:value-type="string">
            <text:p text:style-name="P33"><text:span text:style-name="T110">步驟⑤：取出 ML，Queue 空，輸出完成！</text:span></text:p>
          </table:table-cell>
        </table:table-row>
        <table:table-row table:style-name="表格40.1">
          <table:table-cell table:style-name="表格40.A1" office:value-type="string">
            <text:p text:style-name="P33"><text:span text:style-name="T110">最終輸出：M → S → L → P → ML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Queue 保證合法的拓樸排序？</text:span></text:p>
      <table:table table:name="表格51" table:style-name="表格51">
        <table:table-column table:style-name="表格51.A"/>
        <text:soft-page-break/>
        <table:table-row table:style-name="表格51.1">
          <table:table-cell table:style-name="表格51.A1" office:value-type="string">
            <text:p text:style-name="P8" loext:marker-style-name="T18"><text:span text:style-name="T18">Queue 的 FIFO（先進先出）性質保證：</text:span></text:p>
          </table:table-cell>
        </table:table-row>
        <table:table-row table:style-name="表格51.1">
          <table:table-cell table:style-name="表格51.A1" office:value-type="string">
            <text:p text:style-name="P8"/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凡是 in-degree 降為 0 就立刻進 Queue，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下一個被取出的頂點，它所有的前置依賴必然已經在此之前輸出了。</text:span></text:p>
          </table:table-cell>
        </table:table-row>
        <table:table-row table:style-name="表格51.1">
          <table:table-cell table:style-name="表格51.A1" office:value-type="string">
            <text:p text:style-name="P8"/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原因：某頂點的 in-degree 由 k 降為 0，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代表指向它的 k 條邊都被刪除了，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即這 k 個前置頂點都已被取出並輸出。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此時取出它，依賴關係必然已全部滿足。</text:span></text:p>
          </table:table-cell>
        </table:table-row>
        <table:table-row table:style-name="表格51.1">
          <table:table-cell table:style-name="表格51.A1" office:value-type="string">
            <text:p text:style-name="P8"/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因此 Queue 確保每次輸出的頂點都合法。</text:span></text:p>
          </table:table-cell>
        </table:table-row>
      </table:table>
      <text:p text:style-name="P6"/>
      <text:h text:style-name="P10" text:outline-level="2" loext:marker-style-name="T28"><text:span text:style-name="T28">5-4 </text:span><text:span text:style-name="T29">Cycle 偵測：為什麼有 Cycle 就無法排序？</text:span></text:h>
      <text:p text:style-name="P7" loext:marker-style-name="T14"><text:span text:style-name="T15"><text:s text:c="2"/>▎ </text:span><text:span text:style-name="T16">有 Cycle 的圖長什麼樣？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8" loext:marker-style-name="T18"><text:span text:style-name="T18">有 Cycle 的圖（A→B→C→A 形成環）：</text:span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A ──→ B ──→ C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↑ │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└──────────┘</text:span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 計算：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(A) = 1 （C→A 這條邊指向 A）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(B) = 1 （A→B 這條邊指向 B）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(C) = 1 （B→C 這條邊指向 C）</text:span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所有頂點的 in-degree 都 ≥ 1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Queue 初始化時完全是空的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演算法什麼都取不出來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輸出序列長度 = 0 &lt; V（= 3）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偵測到 Cycle！排序失敗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直覺理解：為什麼 Cycle 讓排序「卡住」？</text:span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8" loext:marker-style-name="T18"><text:span text:style-name="T18">想像任務依賴關係如下（環形依賴）：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「要做 A，必須先完成 C」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「要做 C，必須先完成 B」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「要做 B，必須先完成 A」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問：你要先從哪個任務開始？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答：沒有辦法開始！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因為每個任務都在等另一個任務先完成，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形成互相鎖死（Deadlock）的狀況。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這就是 Cycle 讓 Topological Sort 失敗的本質原因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Kahn's Algorithm 如何自動偵測 Cycle？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8" loext:marker-style-name="T18"><text:span text:style-name="T18">演算法結束後：</text:span></text:p>
          </table:table-cell>
        </table:table-row>
        <table:table-row table:style-name="表格52.1">
          <table:table-cell table:style-name="表格52.A1" office:value-type="string">
            <text:p text:style-name="P8"/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若 已輸出頂點數 = V → 排序成功，圖中無 Cycle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若 已輸出頂點數 &lt; V → 有 Cycle！</text:span></text:p>
          </table:table-cell>
        </table:table-row>
        <text:soft-page-break/>
        <table:table-row table:style-name="表格52.1">
          <table:table-cell table:style-name="表格52.A1" office:value-type="string">
            <text:p text:style-name="P8" loext:marker-style-name="T18"><text:span text:style-name="T18">（剩下未輸出的頂點都被卡在環裡）</text:span></text:p>
          </table:table-cell>
        </table:table-row>
        <table:table-row table:style-name="表格52.1">
          <table:table-cell table:style-name="表格52.A1" office:value-type="string">
            <text:p text:style-name="P8"/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這個偵測邏輯非常自然：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環中的頂點 in-degree 永遠 ≥ 1（環的夥伴持續「佔據」那條邊），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所以永遠不會被放入 Queue，永遠不會被輸出。</text:span></text:p>
          </table:table-cell>
        </table:table-row>
        <table:table-row table:style-name="表格52.1">
          <table:table-cell table:style-name="表格52.A1" office:value-type="string">
            <text:p text:style-name="P8"/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考試申論重點：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可用「輸出序列長度是否等於 V」來判斷是否有 Cycle，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這也是 Kahn's Algorithm 附帶的免費功能。</text:span></text:p>
          </table:table-cell>
        </table:table-row>
      </table:table>
      <text:p text:style-name="P6"/>
      <text:h text:style-name="P10" text:outline-level="2" loext:marker-style-name="T28"><text:span text:style-name="T28">5-5 </text:span><text:span text:style-name="T29">Topological Sort 時間與空間複雜度推導</text:span></text:h>
      <text:p text:style-name="P7" loext:marker-style-name="T14"><text:span text:style-name="T15"><text:s text:c="2"/>▎ </text:span><text:span text:style-name="T16">時間複雜度：O(V + E)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 loext:marker-style-name="T18"><text:span text:style-name="T18">Kahn's Algorithm 分解分析（以 Adjacency List 為前提）：</text:span></text:p>
          </table:table-cell>
        </table:table-row>
        <table:table-row table:style-name="表格42.1">
          <table:table-cell table:style-name="表格42.A1" office:value-type="string">
            <text:p text:style-name="P8"/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① 計算所有 in-degree → 掃描所有邊 O(E)</text:span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② 初始化 Queue（in-degree=0）→ 掃描所有頂點 O(V)</text:span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③ 每個頂點最多進出 Queue 一次 → O(V)</text:span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④ 每條邊在刪除時最多被處理一次 → O(E)</text:span></text:p>
          </table:table-cell>
        </table:table-row>
        <table:table-row table:style-name="表格42.1">
          <table:table-cell table:style-name="表格42.A1" office:value-type="string">
            <text:p text:style-name="P8"/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總時間複雜度：O(V) + O(E) = O(V + E)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O(V+E)？深層原因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8" loext:marker-style-name="T18"><text:span text:style-name="T18">O(V) 的來源：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每個頂點最多進出 Queue 一次（被輸出一次就不再回來）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→ 共 V 個頂點 → O(V)</text:span></text:p>
          </table:table-cell>
        </table:table-row>
        <table:table-row table:style-name="表格46.1">
          <table:table-cell table:style-name="表格46.A1" office:value-type="string">
            <text:p text:style-name="P8"/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O(E) 的來源（有兩個！）：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① 初始計算 in-degree：掃描所有邊 → O(E)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② 每次頂點輸出時，掃描它的 Adjacency List，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對所有後繼頂點各減一次 in-degree：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加總所有頂點的 Adjacency List 長度 = 2E（有向圖是 E）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→ O(E)</text:span></text:p>
          </table:table-cell>
        </table:table-row>
        <table:table-row table:style-name="表格46.1">
          <table:table-cell table:style-name="表格46.A1" office:value-type="string">
            <text:p text:style-name="P8"/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合計：O(V) + O(E) = O(V + E)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空間複雜度：O(V)</text:span></text:p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8" loext:marker-style-name="T18"><text:span text:style-name="T18">Queue 最多放幾個頂點？</text:span></text:p>
          </table:table-cell>
        </table:table-row>
        <table:table-row table:style-name="表格50.1">
          <table:table-cell table:style-name="表格50.A1" office:value-type="string">
            <text:p text:style-name="P8"/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最壞情況（初始就所有頂點的 in-degree 都是 0）：</text:span></text:p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→ V 個頂點同時進入 Queue → Queue 大小 O(V)</text:span></text:p>
          </table:table-cell>
        </table:table-row>
        <table:table-row table:style-name="表格50.1">
          <table:table-cell table:style-name="表格50.A1" office:value-type="string">
            <text:p text:style-name="P8"/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另需：</text:span></text:p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in-degree[ ] 陣列 → O(V)</text:span></text:p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visited / output 陣列 → O(V)</text:span></text:p>
          </table:table-cell>
        </table:table-row>
        <table:table-row table:style-name="表格50.1">
          <table:table-cell table:style-name="表格50.A1" office:value-type="string">
            <text:p text:style-name="P8"/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總空間複雜度：O(V)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⚠ 重要前提：O(V+E) 成立的條件</text:span></text:p>
      <table:table table:name="表格48_1" table:style-name="表格48_5f_1">
        <table:table-column table:style-name="表格48_5f_1.A"/>
        <table:table-row table:style-name="表格48_5f_1.1">
          <table:table-cell table:style-name="表格48_5f_1.A1" office:value-type="string">
            <text:p text:style-name="P8" loext:marker-style-name="T18"><text:span text:style-name="T18">和 BFS / DFS 一樣，Kahn's Algorithm 的 O(V+E) 是在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使用 Adjacency List（或 Adjacency Multilist）的前提下成立的。</text:span></text:p>
          </table:table-cell>
        </table:table-row>
        <table:table-row table:style-name="表格48_5f_1.1">
          <table:table-cell table:style-name="表格48_5f_1.A1" office:value-type="string">
            <text:p text:style-name="P8"/>
          </table:table-cell>
        </table:table-row>
        <text:soft-page-break/>
        <table:table-row table:style-name="表格48_5f_1.1">
          <table:table-cell table:style-name="表格48_5f_1.A1" office:value-type="string">
            <text:p text:style-name="P8" loext:marker-style-name="T18"><text:span text:style-name="T18">若改用 Adjacency Matrix：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每次刪除頂點 u 的邊，需掃描整列（O(V)）才能找到所有後繼節點，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共 V 個頂點 × O(V) = O(V²)，時間複雜度退化為 O(V²)。</text:span></text:p>
          </table:table-cell>
        </table:table-row>
        <table:table-row table:style-name="表格48_5f_1.1">
          <table:table-cell table:style-name="表格48_5f_1.A1" office:value-type="string">
            <text:p text:style-name="P8"/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【一句話結論】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Topological Sort 的 O(V+E) 成立，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是因為 Adjacency List 讓「找後繼節點」直接走串列，不需掃全列。</text:span></text:p>
          </table:table-cell>
        </table:table-row>
      </table:table>
      <text:p text:style-name="P6"/>
      <text:h text:style-name="P10" text:outline-level="2" loext:marker-style-name="T28"><text:span text:style-name="T28">5-6 </text:span><text:span text:style-name="T29">Topological Sort 與 BFS / DFS 的關係</text:span></text:h>
      <text:p text:style-name="P7" loext:marker-style-name="T14"><text:span text:style-name="T15"><text:s text:c="2"/>▎ </text:span><text:span text:style-name="T16">Kahn's Algorithm 本質上是一種「改良版 BFS」</text:span></text:p>
      <table:table table:name="表格47_1" table:style-name="表格47_5f_1">
        <table:table-column table:style-name="表格47_5f_1.A"/>
        <table:table-row table:style-name="表格47_5f_1.1">
          <table:table-cell table:style-name="表格47_5f_1.A1" office:value-type="string">
            <text:p text:style-name="P8" loext:marker-style-name="T18"><text:span text:style-name="T18">比較項目 BFS（廣度優先） Kahn's Algorithm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使用的佇列 Queue（FIFO） Queue（FIFO）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起始條件 起點頂點（指定） 所有 in-degree=0 的頂點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探索條件 鄰居未被拜訪 鄰居 in-degree 降為 0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目的 遍歷所有頂點 依賴順序輸出所有頂點</text:span></text:p>
          </table:table-cell>
        </table:table-row>
        <table:table-row table:style-name="表格47_5f_1.1">
          <table:table-cell table:style-name="表格47_5f_1.A1" office:value-type="string">
            <text:p text:style-name="P8"/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核心差異：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BFS 從一個起點「廣度展開」；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Kahn's 從所有「已無依賴」的頂點一起出發，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每輸出一個頂點，就「解鎖」它的後繼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DFS 也可以做 Topological Sort</text:span></text:p>
      <table:table table:name="表格51_1" table:style-name="表格51_5f_1">
        <table:table-column table:style-name="表格51_5f_1.A"/>
        <table:table-row table:style-name="表格51_5f_1.1">
          <table:table-cell table:style-name="表格51_5f_1.A1" office:value-type="string">
            <text:p text:style-name="P8" loext:marker-style-name="T18"><text:span text:style-name="T18">除了 Kahn's Algorithm（BFS-based），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DFS 也可以實現 Topological Sort：</text:span></text:p>
          </table:table-cell>
        </table:table-row>
        <table:table-row table:style-name="表格51_5f_1.1">
          <table:table-cell table:style-name="表格51_5f_1.A1" office:value-type="string">
            <text:p text:style-name="P8"/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步驟：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① DFS 遍歷，當一個頂點「所有後繼都探索完畢」時，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把它加入一個 Stack 或輸出 list 的前端（prepend）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② DFS 結束後，Stack 或 list 的順序就是拓樸排序</text:span></text:p>
          </table:table-cell>
        </table:table-row>
        <table:table-row table:style-name="表格51_5f_1.1">
          <table:table-cell table:style-name="表格51_5f_1.A1" office:value-type="string">
            <text:p text:style-name="P8"/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直覺：「後繼都完成了」才輸出，所以被依賴的一定排在前面。</text:span></text:p>
          </table:table-cell>
        </table:table-row>
        <table:table-row table:style-name="表格51_5f_1.1">
          <table:table-cell table:style-name="表格51_5f_1.A1" office:value-type="string">
            <text:p text:style-name="P8"/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公職考試通常考 Kahn's Algorithm（in-degree 版）。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DFS 版了解概念即可，不需要死背步驟。</text:span></text:p>
          </table:table-cell>
        </table:table-row>
      </table:table>
      <text:p text:style-name="P6"/>
      <text:h text:style-name="P10" text:outline-level="2" loext:marker-style-name="T28"><text:span text:style-name="T28">5-7 </text:span><text:span text:style-name="T29">考試申論題標準答案（拓樸排序）</text:span></text:h>
      <text:p text:style-name="P7" loext:marker-style-name="T14"><text:span text:style-name="T15"><text:s text:c="2"/>▎ </text:span><text:span text:style-name="T16">◆ Q1：說明 Topological Sort 的前提條件與步驟</text:span></text:p>
      <table:table table:name="表格43_1" table:style-name="表格43_5f_1">
        <table:table-column table:style-name="表格43_5f_1.A"/>
        <table:table-row table:style-name="表格43_5f_1.1">
          <table:table-cell table:style-name="表格43_5f_1.A1" office:value-type="string">
            <text:p text:style-name="P8" loext:marker-style-name="T18"><text:span text:style-name="T18">前提條件：圖必須是 DAG（Directed Acyclic Graph，有向無環圖）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若含有 Cycle，則任何頂點排序都會違反至少一條依賴關係，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無法完成拓樸排序。</text:span></text:p>
          </table:table-cell>
        </table:table-row>
        <table:table-row table:style-name="表格43_5f_1.1">
          <table:table-cell table:style-name="表格43_5f_1.A1" office:value-type="string">
            <text:p text:style-name="P8"/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Kahn's Algorithm 步驟：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① 計算所有頂點的 in-degree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② 將所有 in-degree = 0 的頂點加入 Queue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③ 重複以下步驟直到 Queue 為空：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a. 取出頂點 u，輸出 u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b. 對 u 的每個後繼頂點 v，將 in-degree[v] 減 1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c. 若 in-degree[v] = 0，則將 v 加入 Queue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④ 若輸出頂點數 &lt; V，則圖中存在 Cycle。</text:span></text:p>
          </table:table-cell>
        </table:table-row>
      </table:table>
      <text:p text:style-name="P6"/>
      <text:p text:style-name="P7" loext:marker-style-name="T14"><text:soft-page-break/><text:span text:style-name="T15"><text:s text:c="2"/>▎ </text:span><text:span text:style-name="T16">◆ Q2：為什麼有 Cycle 的圖無法進行 Topological Sort？</text:span></text:p>
      <table:table table:name="表格45_1" table:style-name="表格45_5f_1">
        <table:table-column table:style-name="表格45_5f_1.A"/>
        <table:table-row table:style-name="表格45_5f_1.1">
          <table:table-cell table:style-name="表格45_5f_1.A1" office:value-type="string">
            <text:p text:style-name="P8" loext:marker-style-name="T18"><text:span text:style-name="T18">標準答案：</text:span></text:p>
          </table:table-cell>
        </table:table-row>
        <table:table-row table:style-name="表格45_5f_1.1">
          <table:table-cell table:style-name="表格45_5f_1.A1" office:value-type="string">
            <text:p text:style-name="P8"/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Kahn's Algorithm 依靠「找 in-degree=0 的頂點」作為起始。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在含 Cycle 的圖中（如 A→B→C→A）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Cycle 上每個頂點都有至少一條邊指向它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in-degree ≥ 1，沒有任何頂點可被選出。</text:span></text:p>
          </table:table-cell>
        </table:table-row>
        <table:table-row table:style-name="表格45_5f_1.1">
          <table:table-cell table:style-name="表格45_5f_1.A1" office:value-type="string">
            <text:p text:style-name="P8"/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演算法結束時輸出頂點數 &lt; V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即代表存在 Cycle，無法完成拓樸排序。</text:span></text:p>
          </table:table-cell>
        </table:table-row>
        <table:table-row table:style-name="表格45_5f_1.1">
          <table:table-cell table:style-name="表格45_5f_1.A1" office:value-type="string">
            <text:p text:style-name="P8"/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本質原因：Cycle 造成互相等待（Deadlock）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無法找到一個「沒有前置任務」的起點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◆ Q3：說明 Topological Sort 的時間與空間複雜度</text:span></text:p>
      <table:table table:name="表格46_1" table:style-name="表格46_5f_1">
        <table:table-column table:style-name="表格46_5f_1.A"/>
        <table:table-row table:style-name="表格46_5f_1.1">
          <table:table-cell table:style-name="表格46_5f_1.A1" office:value-type="string">
            <text:p text:style-name="P8" loext:marker-style-name="T18"><text:span text:style-name="T18">時間複雜度：O(V + E)（以 Adjacency List 為前提）</text:span></text:p>
          </table:table-cell>
        </table:table-row>
        <table:table-row table:style-name="表格46_5f_1.1">
          <table:table-cell table:style-name="表格46_5f_1.A1" office:value-type="string">
            <text:p text:style-name="P8"/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原因：每個頂點最多進出 Queue 一次 → O(V)；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每條邊最多被刪除（減少 in-degree）一次 → O(E)。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合計 O(V + E)。</text:span></text:p>
          </table:table-cell>
        </table:table-row>
        <table:table-row table:style-name="表格46_5f_1.1">
          <table:table-cell table:style-name="表格46_5f_1.A1" office:value-type="string">
            <text:p text:style-name="P8"/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空間複雜度：O(V)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原因：Queue 最多存放 V 個頂點；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in-degree 陣列大小為 V，共需 O(V) 空間。</text:span></text:p>
          </table:table-cell>
        </table:table-row>
        <table:table-row table:style-name="表格46_5f_1.1">
          <table:table-cell table:style-name="表格46_5f_1.A1" office:value-type="string">
            <text:p text:style-name="P8"/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若使用 Adjacency Matrix，時間退化為 O(V²)，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因為每次尋找後繼節點需掃描完整一列（O(V)）。</text:span></text:p>
          </table:table-cell>
        </table:table-row>
      </table:table>
      <text:p text:style-name="P6"/>
      <text:p text:style-name="Standard"/>
      <text:h text:style-name="P34" text:outline-level="1" loext:marker-style-name="T9">六<text:span text:style-name="T10">、考試速查表（最終記憶版）</text:span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9" loext:marker-style-name="T69"><text:span text:style-name="T70">主題</text:span><text:span text:style-name="T69"/></text:p>
          </table:table-cell>
          <table:table-cell table:style-name="表格53.A1" office:value-type="string">
            <text:p text:style-name="P11" loext:marker-style-name="T69"><text:span text:style-name="T70">關鍵字 </text:span><text:span text:style-name="T71">/ </text:span><text:span text:style-name="T70">公式</text:span></text:p>
          </table:table-cell>
          <table:table-cell table:style-name="表格53.A1" office:value-type="string">
            <text:p text:style-name="P9" loext:marker-style-name="T69"><text:span text:style-name="T70">補充說明</text:span><text:span text:style-name="T69"/></text:p>
          </table:table-cell>
        </table:table-row>
        <table:table-row table:style-name="表格53.1">
          <table:table-cell table:style-name="表格53.A2" office:value-type="string">
            <text:p text:style-name="P9" loext:marker-style-name="T21"><text:span text:style-name="T23">BFS</text:span><text:span text:style-name="T21"/></text:p>
          </table:table-cell>
          <table:table-cell table:style-name="表格53.A2" office:value-type="string">
            <text:p text:style-name="P11" loext:marker-style-name="T21"><text:span text:style-name="T23">Queue + FIFO</text:span><text:span text:style-name="T21"/></text:p>
          </table:table-cell>
          <table:table-cell table:style-name="表格53.C2" office:value-type="string">
            <text:p text:style-name="P9" loext:marker-style-name="T11"><text:span text:style-name="T12">B→Q</text:span><text:span text:style-name="T13">；時間</text:span><text:span text:style-name="T12">O(V+E)</text:span><text:span text:style-name="T13">；空間</text:span><text:span text:style-name="T12">O(V)</text:span><text:span text:style-name="T13">；</text:span><text:span text:style-name="T12">BFS </text:span><text:span text:style-name="T13">不依</text:span><text:span text:style-name="T12">cost</text:span><text:span text:style-name="T13">排序</text:span></text:p>
          </table:table-cell>
        </table:table-row>
        <table:table-row table:style-name="表格53.1">
          <table:table-cell table:style-name="表格53.A3" office:value-type="string">
            <text:p text:style-name="P9" loext:marker-style-name="T90"><text:span text:style-name="T93">DFS</text:span><text:span text:style-name="T90"/></text:p>
          </table:table-cell>
          <table:table-cell table:style-name="表格53.A3" office:value-type="string">
            <text:p text:style-name="P11" loext:marker-style-name="T90"><text:span text:style-name="T93">Stack + LIFO</text:span><text:span text:style-name="T90"/></text:p>
          </table:table-cell>
          <table:table-cell table:style-name="表格53.C3" office:value-type="string">
            <text:p text:style-name="P9" loext:marker-style-name="T11"><text:span text:style-name="T12">D→S</text:span><text:span text:style-name="T13">；時間</text:span><text:span text:style-name="T12">O(V+E)</text:span><text:span text:style-name="T13">；空間</text:span><text:span text:style-name="T12">O(V)</text:span><text:span text:style-name="T13">；欲走低</text:span><text:span text:style-name="T12">cost→</text:span><text:span text:style-name="T13">先</text:span><text:span text:style-name="T12">push</text:span><text:span text:style-name="T13">高</text:span><text:span text:style-name="T12">cost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Dense Graph</text:span><text:span text:style-name="T72"/></text:p>
          </table:table-cell>
          <table:table-cell table:style-name="表格53.A2" office:value-type="string">
            <text:p text:style-name="P11" loext:marker-style-name="T21"><text:span text:style-name="T23">Adjacency Matrix</text:span><text:span text:style-name="T21"/></text:p>
          </table:table-cell>
          <table:table-cell table:style-name="表格53.C2" office:value-type="string">
            <text:p text:style-name="P9" loext:marker-style-name="T11"><text:span text:style-name="T13">空間</text:span><text:span text:style-name="T12">O(V²)</text:span><text:span text:style-name="T13">；查邊</text:span><text:span text:style-name="T12">O(1)</text:span><text:span text:style-name="T13">；</text:span><text:span text:style-name="T12">Degree O(n²)</text:span><text:span text:style-name="T13">；</text:span><text:span text:style-name="T12">1bit/</text:span><text:span text:style-name="T13">格省空間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8">Sparse Graph</text:span><text:span text:style-name="T72"/></text:p>
          </table:table-cell>
          <table:table-cell table:style-name="表格53.A3" office:value-type="string">
            <text:p text:style-name="P11" loext:marker-style-name="T90"><text:span text:style-name="T93">List / Multilist</text:span><text:span text:style-name="T90"/></text:p>
          </table:table-cell>
          <table:table-cell table:style-name="表格53.C3" office:value-type="string">
            <text:p text:style-name="P9" loext:marker-style-name="T11"><text:span text:style-name="T13">空間</text:span><text:span text:style-name="T12">O(V+E)</text:span><text:span text:style-name="T13">；查邊</text:span><text:span text:style-name="T12">O(degree)</text:span><text:span text:style-name="T13">；</text:span><text:span text:style-name="T12">Degree O(n+e)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Topological Sort</text:span><text:span text:style-name="T72"/></text:p>
          </table:table-cell>
          <table:table-cell table:style-name="表格53.B6" office:value-type="string">
            <text:p text:style-name="P11" loext:marker-style-name="T142"><text:span text:style-name="T143">in-degree=0 </text:span><text:span text:style-name="T146">先出</text:span></text:p>
          </table:table-cell>
          <table:table-cell table:style-name="表格53.C2" office:value-type="string">
            <text:p text:style-name="P9" loext:marker-style-name="T11"><text:span text:style-name="T13">時間</text:span><text:span text:style-name="T12">O(V+E)</text:span><text:span text:style-name="T13">；空間</text:span><text:span text:style-name="T12">O(V)</text:span><text:span text:style-name="T13">；只適用 </text:span><text:span text:style-name="T12">DAG</text:span><text:span text:style-name="T13">；有</text:span><text:span text:style-name="T12">Cycle→</text:span><text:span text:style-name="T13">失敗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3">有 </text:span><text:span text:style-name="T78">Cycle </text:span><text:span text:style-name="T73">的圖</text:span></text:p>
          </table:table-cell>
          <table:table-cell table:style-name="表格53.B7" office:value-type="string">
            <text:p text:style-name="P11" loext:marker-style-name="T74"><text:span text:style-name="T147">無法 </text:span><text:span text:style-name="T75">Topological Sort</text:span></text:p>
          </table:table-cell>
          <table:table-cell table:style-name="表格53.C3" office:value-type="string">
            <text:p text:style-name="P9" loext:marker-style-name="T11"><text:span text:style-name="T13">所有點 </text:span><text:span text:style-name="T12">in-degree&gt;0</text:span><text:span text:style-name="T13">，</text:span><text:span text:style-name="T12">Queue </text:span><text:span text:style-name="T13">永遠空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Prim + Matrix</text:span><text:span text:style-name="T72"/></text:p>
          </table:table-cell>
          <table:table-cell table:style-name="表格53.A2" office:value-type="string">
            <text:p text:style-name="P11" loext:marker-style-name="T21"><text:span text:style-name="T23">O(V²)</text:span><text:span text:style-name="T21"/></text:p>
          </table:table-cell>
          <table:table-cell table:style-name="表格53.C2" office:value-type="string">
            <text:p text:style-name="P9" loext:marker-style-name="T11"><text:span text:style-name="T13">每輪掃描 </text:span><text:span text:style-name="T12">V </text:span><text:span text:style-name="T13">個頂點找最小 </text:span><text:span text:style-name="T12">× V </text:span><text:span text:style-name="T13">輪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8">Prim + Heap</text:span><text:span text:style-name="T72"/></text:p>
          </table:table-cell>
          <table:table-cell table:style-name="表格53.A3" office:value-type="string">
            <text:p text:style-name="P11" loext:marker-style-name="T90"><text:span text:style-name="T93">O(E log V)</text:span><text:span text:style-name="T90"/></text:p>
          </table:table-cell>
          <table:table-cell table:style-name="表格53.C3" office:value-type="string">
            <text:p text:style-name="P9" loext:marker-style-name="T11"><text:span text:style-name="T13">每條邊 </text:span><text:span text:style-name="T12">O(log V)</text:span><text:span text:style-name="T13">；共 </text:span><text:span text:style-name="T12">E </text:span><text:span text:style-name="T13">條邊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Multilist </text:span><text:span text:style-name="T73">邊儲存</text:span></text:p>
          </table:table-cell>
          <table:table-cell table:style-name="表格53.B10" office:value-type="string">
            <text:p text:style-name="P11" loext:marker-style-name="T76"><text:span text:style-name="T148">每條邊只存一次</text:span><text:span text:style-name="T76"/></text:p>
          </table:table-cell>
          <table:table-cell table:style-name="表格53.C2" office:value-type="string">
            <text:p text:style-name="P9" loext:marker-style-name="T11"><text:span text:style-name="T12">List </text:span><text:span text:style-name="T13">存兩次；</text:span><text:span text:style-name="T12">Multilist </text:span><text:span text:style-name="T13">用 </text:span><text:span text:style-name="T12">link1/link2 </text:span><text:span text:style-name="T13">兩端共用</text:span></text:p>
          </table:table-cell>
        </table:table-row>
      </table:table>
      <text:p text:style-name="P6"/>
      <text:h text:style-name="P35" text:outline-level="1" loext:marker-style-name="T9">七<text:span text:style-name="T10">、常見申論題標準答案</text:span><text:span text:style-name="T9"/></text:h>
      <text:p text:style-name="P36" loext:marker-style-name="T149"><text:span text:style-name="T150">◆ Q1</text:span><text:span text:style-name="T151">：為什麼 </text:span><text:span text:style-name="T150">Adjacency Multilist </text:span><text:span text:style-name="T151">比 </text:span><text:span text:style-name="T150">Adjacency List </text:span><text:span text:style-name="T151">節省空間？</text:span></text:p>
      <text:p text:style-name="P37" loext:marker-style-name="T152"><text:span text:style-name="T153">標準答案</text:span><text:span text:style-name="T152"/></text:p>
      <text:p text:style-name="P5" loext:marker-style-name="T11"><text:span text:style-name="T12">Adjacency List </text:span><text:span text:style-name="T13">在無向圖中，同一條邊需在兩個頂點的串列各存一次（</text:span><text:span text:style-name="T12">A→B </text:span><text:span text:style-name="T13">與 </text:span><text:span text:style-name="T12">B→A </text:span><text:span text:style-name="T13">分別存放），</text:span><text:span text:style-name="T12">V </text:span><text:span text:style-name="T13">個頂點 </text:span><text:span text:style-name="T12">E </text:span><text:span text:style-name="T13">條邊共需 </text:span><text:span text:style-name="T12">V+2E </text:span><text:span text:style-name="T13">個節點。</text:span><text:span text:style-name="T12">Adjacency Multilist </text:span><text:span text:style-name="T13">每條邊只建立一個 </text:span><text:span text:style-name="T12">Edge </text:span><text:span text:style-name="T13">節點 </text:span><text:span text:style-name="T12">[V1, V2, link1, link2]</text:span><text:span text:style-name="T13">，由兩端頂點透過 </text:span><text:span text:style-name="T12">link1/link2 </text:span><text:span text:style-name="T13">共同指向，只需 </text:span><text:span text:style-name="T12">V+E </text:span><text:span text:style-name="T13">個節點，節省了 </text:span><text:span text:style-name="T12">E </text:span><text:span text:style-name="T13">個節點的空間，且修改一條邊只需更新一個節點。</text:span></text:p>
      <text:p text:style-name="P6"/>
      <text:p text:style-name="P36" loext:marker-style-name="T149"><text:span text:style-name="T150">◆ Q2</text:span><text:span text:style-name="T151">：為什麼有 </text:span><text:span text:style-name="T150">Cycle </text:span><text:span text:style-name="T151">的圖無法進行 </text:span><text:span text:style-name="T150">Topological Sort</text:span><text:span text:style-name="T151">？</text:span></text:p>
      <text:p text:style-name="P37" loext:marker-style-name="T152"><text:span text:style-name="T153">標準答案</text:span><text:span text:style-name="T152"/></text:p>
      <text:p text:style-name="P5" loext:marker-style-name="T11"><text:span text:style-name="T12">Kahn's Algorithm </text:span><text:span text:style-name="T13">依靠「找 </text:span><text:span text:style-name="T12">in-degree=0 </text:span><text:span text:style-name="T13">的頂點」作為起始。在含 </text:span><text:span text:style-name="T12">Cycle </text:span><text:span text:style-name="T13">的圖中（如 </text:span><text:span text:style-name="T12">A→B→C→A</text:span><text:span text:style-name="T13">），</text:span><text:span text:style-name="T12">Cycle </text:span><text:span text:style-name="T13">上每個頂點都有至少一條邊指向它，所有頂點的 </text:span><text:span text:style-name="T12">in-degree≥1</text:span><text:span text:style-name="T13">，沒有任何頂點能被選出，演算法結束時輸出頂點數 </text:span><text:span text:style-name="T12">&lt; V</text:span><text:span text:style-name="T13">，即代表存在 </text:span><text:span text:style-name="T12">Cycle</text:span><text:span text:style-name="T13">，無法完成拓樸排序。</text:span></text:p>
      <text:p text:style-name="P6"/>
      <text:p text:style-name="P36" loext:marker-style-name="T149"><text:span text:style-name="T150">◆ Q3</text:span><text:span text:style-name="T151">：比較 </text:span><text:span text:style-name="T150">Prim </text:span><text:span text:style-name="T151">使用矩陣 </text:span><text:span text:style-name="T150">O(V²) </text:span><text:span text:style-name="T151">與使用 </text:span><text:span text:style-name="T150">Heap O(E log V) </text:span><text:span text:style-name="T151">的原因</text:span></text:p>
      <text:p text:style-name="P37" loext:marker-style-name="T152"><text:span text:style-name="T153">標準答案</text:span><text:span text:style-name="T152"/></text:p>
      <text:p text:style-name="P5" loext:marker-style-name="T11"><text:span text:style-name="T13">使用 </text:span><text:span text:style-name="T12">Adjacency Matrix</text:span><text:span text:style-name="T13">：維護 </text:span><text:span text:style-name="T12">dist[] </text:span><text:span text:style-name="T13">陣列，每輪需掃描全部 </text:span><text:span text:style-name="T12">V </text:span><text:span text:style-name="T13">個頂點找最小距離（</text:span><text:span text:style-name="T12">O(V)</text:span><text:span text:style-name="T13">），更新鄰居也需掃描矩陣第 </text:span><text:span text:style-name="T12">u </text:span><text:span text:style-name="T13">列（</text:span><text:span text:style-name="T12">O(V)</text:span><text:span text:style-name="T13">），共執行 </text:span><text:span text:style-name="T12">V </text:span><text:span text:style-name="T13">輪，故總時間 </text:span><text:span text:style-name="T12">O(V²)</text:span><text:span text:style-name="T13">。適合稠密圖。</text:span></text:p>
      <text:p text:style-name="P5" loext:marker-style-name="T11"><text:span text:style-name="T13">使用 </text:span><text:span text:style-name="T12">Binary Heap</text:span><text:span text:style-name="T13">：用 </text:span><text:span text:style-name="T12">Priority Queue </text:span><text:span text:style-name="T13">維護候選邊，</text:span><text:span text:style-name="T12">extract-min </text:span><text:span text:style-name="T13">為 </text:span><text:span text:style-name="T12">O(log V)</text:span><text:span text:style-name="T13">，每條邊最多被插入 </text:span><text:span text:style-name="T12">Heap </text:span><text:span text:style-name="T13">一次（</text:span><text:span text:style-name="T12">O(log V)</text:span><text:span text:style-name="T13">），共 </text:span><text:span text:style-name="T12">E </text:span><text:span text:style-name="T13">條邊，故總時間 </text:span><text:span text:style-name="T12">O(E log V)</text:span><text:span text:style-name="T13">。適合稀疏圖。</text:span></text:p>
      <text:p text:style-name="P6"/>
      <text:p text:style-name="P36" loext:marker-style-name="T149"><text:span text:style-name="T150">◆ Q4</text:span><text:span text:style-name="T151">：</text:span><text:span text:style-name="T150">Matrix </text:span><text:span text:style-name="T151">計算所有 </text:span><text:span text:style-name="T150">Degree </text:span><text:span text:style-name="T151">為 </text:span><text:span text:style-name="T150">O(n²) vs Multilist </text:span><text:span text:style-name="T151">為 </text:span><text:span text:style-name="T150">O(n+e) </text:span><text:span text:style-name="T151">的原因</text:span></text:p>
      <text:p text:style-name="P37" loext:marker-style-name="T152"><text:span text:style-name="T153">標準答案</text:span><text:span text:style-name="T152"/></text:p>
      <text:p text:style-name="P5" loext:marker-style-name="T11"><text:span text:style-name="T12">Matrix</text:span><text:span text:style-name="T13">：計算頂點 </text:span><text:span text:style-name="T12">v </text:span><text:span text:style-name="T13">的 </text:span><text:span text:style-name="T12">Degree </text:span><text:span text:style-name="T13">需掃描第 </text:span><text:span text:style-name="T12">v </text:span><text:span text:style-name="T13">列 </text:span><text:span text:style-name="T12">n </text:span><text:span text:style-name="T13">個格子（</text:span><text:span text:style-name="T12">O(n)</text:span><text:span text:style-name="T13">）；計算全部 </text:span><text:span text:style-name="T12">n </text:span><text:span text:style-name="T13">個頂點共 </text:span><text:span text:style-name="T12">n×O(n)=O(n²)</text:span><text:span text:style-name="T13">，即使大部分格子是 </text:span><text:span text:style-name="T12">0 </text:span><text:span text:style-name="T13">也必須掃描。</text:span></text:p>
      <text:p text:style-name="P5" loext:marker-style-name="T11"><text:span text:style-name="T12">Multilist</text:span><text:span text:style-name="T13">：每個 </text:span><text:span text:style-name="T12">Edge </text:span><text:span text:style-name="T13">節點恰好被走訪兩次（</text:span><text:span text:style-name="T12">V1 </text:span><text:span text:style-name="T13">端與 </text:span><text:span text:style-name="T12">V2 </text:span><text:span text:style-name="T13">端各一次），加上走訪 </text:span><text:span text:style-name="T12">n </text:span><text:span text:style-name="T13">個頂點起始指標，共 </text:span><text:span text:style-name="T12">n+2e </text:span><text:span text:style-name="T13">步 </text:span><text:span text:style-name="T12">= O(n+e)</text:span><text:span text:style-name="T13">，完全不浪費在「不存在的邊」上。</text:span></text:p>
      <text:p text:style-name="P6"/>
      <text:p text:style-name="P38" loext:marker-style-name="T154"><text:soft-page-break/><text:span text:style-name="T155">本筆記整合圖片原始內容 </text:span><text:span text:style-name="T156">+ </text:span><text:span text:style-name="T155">逐步圖解 </text:span><text:span text:style-name="T156">+ </text:span><text:span text:style-name="T155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8T00:34:27</meta:creation-date>
    <meta:initial-creator>Un-named</meta:initial-creator>
    <dc:language>en-US</dc:language>
    <dc:date>2026-06-09T22:45:07.087644200</dc:date>
    <meta:editing-cycles>171</meta:editing-cycles>
    <meta:editing-duration>PT18H14M29S</meta:editing-duration>
    <meta:generator>LibreOffice/26.2.3.2$Windows_X86_64 LibreOffice_project/70e089b17412e4cb7773e41413306b17a2328c34</meta:generator>
    <meta:document-statistic meta:table-count="65" meta:image-count="0" meta:object-count="0" meta:page-count="24" meta:paragraph-count="885" meta:word-count="9620" meta:character-count="19570" meta:non-whitespace-character-count="15072"/>
    <meta:user-defined meta:name="AppVersion">15.0000</meta:user-defined>
  </office:meta>
</office:document-meta>
</file>