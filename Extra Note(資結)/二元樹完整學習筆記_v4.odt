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3.81cm"/>
    </style:style>
    <style:style style:name="表格101.B" style:family="table-column">
      <style:table-column-properties style:column-width="6.3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01.A2" style:family="table-cell">
      <style:table-cell-properties fo:padding-left="0.212cm" fo:padding-right="0.212cm" fo:padding-top="0.141cm" fo:padding-bottom="0.141cm" fo:border="0.1pt solid #5b2c6f"/>
    </style:style>
    <style:style style:name="表格101.B2" style:family="table-cell">
      <style:table-cell-properties fo:padding-left="0.212cm" fo:padding-right="0.212cm" fo:padding-top="0.141cm" fo:padding-bottom="0.141cm" fo:border="0.1pt solid #5b2c6f"/>
    </style:style>
    <style:style style:name="表格101.C2" style:family="table-cell">
      <style:table-cell-properties fo:padding-left="0.212cm" fo:padding-right="0.212cm" fo:padding-top="0.141cm" fo:padding-bottom="0.141cm" fo:border="0.1pt solid #5b2c6f"/>
    </style:style>
    <style:style style:name="表格101.A3" style:family="table-cell">
      <style:table-cell-properties fo:padding-left="0.212cm" fo:padding-right="0.212cm" fo:padding-top="0.141cm" fo:padding-bottom="0.141cm" fo:border="0.1pt solid #5b2c6f"/>
    </style:style>
    <style:style style:name="表格101.B3" style:family="table-cell">
      <style:table-cell-properties fo:padding-left="0.212cm" fo:padding-right="0.212cm" fo:padding-top="0.141cm" fo:padding-bottom="0.141cm" fo:border="0.1pt solid #5b2c6f"/>
    </style:style>
    <style:style style:name="表格101.C3" style:family="table-cell">
      <style:table-cell-properties fo:padding-left="0.212cm" fo:padding-right="0.212cm" fo:padding-top="0.141cm" fo:padding-bottom="0.141cm" fo:border="0.1pt solid #5b2c6f"/>
    </style:style>
    <style:style style:name="表格101.A4" style:family="table-cell">
      <style:table-cell-properties fo:padding-left="0.212cm" fo:padding-right="0.212cm" fo:padding-top="0.141cm" fo:padding-bottom="0.141cm" fo:border="0.1pt solid #5b2c6f"/>
    </style:style>
    <style:style style:name="表格101.B4" style:family="table-cell">
      <style:table-cell-properties fo:padding-left="0.212cm" fo:padding-right="0.212cm" fo:padding-top="0.141cm" fo:padding-bottom="0.141cm" fo:border="0.1pt solid #5b2c6f"/>
    </style:style>
    <style:style style:name="表格101.C4" style:family="table-cell">
      <style:table-cell-properties fo:padding-left="0.212cm" fo:padding-right="0.212cm" fo:padding-top="0.141cm" fo:padding-bottom="0.141cm" fo:border="0.1pt solid #5b2c6f"/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5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6" style:family="paragraph" style:parent-style-name="Heading_20_2">
      <style:paragraph-properties fo:margin-top="0.423cm" fo:margin-bottom="0.212cm" style:contextual-spacing="false"/>
    </style:style>
    <style:style style:name="P7" style:family="paragraph" style:parent-style-name="Standard">
      <style:paragraph-properties fo:margin-top="0.088cm" fo:margin-bottom="0.088cm" style:contextual-spacing="false"/>
    </style:style>
    <style:style style:name="P8" style:family="paragraph" style:parent-style-name="Standard">
      <style:paragraph-properties fo:margin-top="0.071cm" fo:margin-bottom="0.071cm" style:contextual-spacing="false"/>
    </style:style>
    <style:style style:name="P9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1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2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3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4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7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1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19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0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21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22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23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24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5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6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7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28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2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3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31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35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3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8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41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43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44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45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46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47" style:family="paragraph" style:parent-style-name="Standard">
      <style:text-properties officeooo:paragraph-rsid="00549b67"/>
    </style:style>
    <style:style style:name="P48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49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50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51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52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53" style:family="paragraph" style:parent-style-name="Standard">
      <style:text-properties officeooo:paragraph-rsid="00529de2"/>
    </style:style>
    <style:style style:name="P54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5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6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7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8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59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60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61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6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6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65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66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67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68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7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7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75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8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7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8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8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82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4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8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87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88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89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92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93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4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9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98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99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0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1" style:family="paragraph" style:parent-style-name="Standard"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4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6" style:family="text">
      <style:text-properties fo:background-color="#76ff03" loext:char-shading-value="0"/>
    </style:style>
    <style:style style:name="T7" style:family="text">
      <style:text-properties fo:background-color="#18ffff" loext:char-shading-value="0"/>
    </style:style>
    <style:style style:name="T8" style:family="text">
      <style:text-properties fo:background-color="#18ffff" loext:char-shading-value="0"/>
    </style:style>
    <style:style style:name="T9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0" style:family="text">
      <style:text-properties fo:color="#eeff41" loext:opacity="100%"/>
    </style:style>
    <style:style style:name="T11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12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3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eeff41" loext:opacity="100%" fo:font-weight="bold" fo:background-color="#5d4037" loext:char-shading-value="0" style:font-weight-asian="bold" style:font-weight-complex="bold"/>
    </style:style>
    <style:style style:name="T17" style:family="text">
      <style:text-properties fo:color="#eeff41" loext:opacity="100%" fo:background-color="#f50057" loext:char-shading-value="0"/>
    </style:style>
    <style:style style:name="T18" style:family="text">
      <style:text-properties fo:color="#eeff41" loext:opacity="100%" fo:background-color="#f50057" loext:char-shading-value="0"/>
    </style:style>
    <style:style style:name="T19" style:family="text">
      <style:text-properties fo:color="#76ff03" loext:opacity="100%"/>
    </style:style>
    <style:style style:name="T20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1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2" style:family="text">
      <style:text-properties fo:color="#76ff03" loext:opacity="100%" fo:background-color="#5d4037" loext:char-shading-value="0"/>
    </style:style>
    <style:style style:name="T23" style:family="text">
      <style:text-properties fo:color="#76ff03" loext:opacity="100%" fo:background-color="#5d4037" loext:char-shading-value="0"/>
    </style:style>
    <style:style style:name="T24" style:family="text">
      <style:text-properties fo:color="#18ffff" loext:opacity="100%"/>
    </style:style>
    <style:style style:name="T25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6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color="#18ffff" loext:opacity="100%" fo:background-color="#d500f9" loext:char-shading-value="0"/>
    </style:style>
    <style:style style:name="T32" style:family="text">
      <style:text-properties fo:font-weight="bold" fo:background-color="#eeff41" loext:char-shading-value="0" style:font-weight-asian="bold" style:font-weight-complex="bold"/>
    </style:style>
    <style:style style:name="T33" style:family="text">
      <style:text-properties fo:font-weight="bold" fo:background-color="#eeff41" loext:char-shading-value="0" style:font-weight-asian="bold" style:font-weight-complex="bold"/>
    </style:style>
    <style:style style:name="T34" style:family="text">
      <style:text-properties fo:font-weight="bold" fo:background-color="#ffff00" loext:char-shading-value="0" style:font-weight-asian="bold" style:font-weight-complex="bold"/>
    </style:style>
    <style:style style:name="T35" style:family="text">
      <style:text-properties fo:font-weight="bold" fo:background-color="#ffff00" loext:char-shading-value="0" style:font-weight-asian="bold" style:font-weight-complex="bold"/>
    </style:style>
    <style:style style:name="T36" style:family="text">
      <style:text-properties fo:font-weight="bold" fo:background-color="#ffd740" loext:char-shading-value="0" style:font-weight-asian="bold" style:font-weight-complex="bold"/>
    </style:style>
    <style:style style:name="T37" style:family="text">
      <style:text-properties fo:font-weight="bold" fo:background-color="#18ffff" loext:char-shading-value="0" style:font-weight-asian="bold" style:font-weight-complex="bold"/>
    </style:style>
    <style:style style:name="T38" style:family="text">
      <style:text-properties fo:font-weight="bold" fo:background-color="#e040fb" loext:char-shading-value="0" style:font-weight-asian="bold" style:font-weight-complex="bold"/>
    </style:style>
    <style:style style:name="T39" style:family="text">
      <style:text-properties fo:background-color="#d500f9" loext:char-shading-value="0"/>
    </style:style>
    <style:style style:name="T40" style:family="text">
      <style:text-properties fo:color="#ffff00" loext:opacity="100%"/>
    </style:style>
    <style:style style:name="T41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3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4" style:family="text">
      <style:text-properties fo:color="#ffff00" loext:opacity="100%" fo:background-color="#ff9100" loext:char-shading-value="0"/>
    </style:style>
    <style:style style:name="T45" style:family="text">
      <style:text-properties fo:color="#ffff00" loext:opacity="100%" fo:background-color="#ff91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#ffd740" loext:char-shading-value="0"/>
    </style:style>
    <style:style style:name="T49" style:family="text">
      <style:text-properties fo:background-color="#ffd740" loext:char-shading-value="0"/>
    </style:style>
    <style:style style:name="T50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51" style:family="text">
      <style:text-properties fo:background-color="#eeff41" loext:char-shading-value="0"/>
    </style:style>
    <style:style style:name="T52" style:family="text">
      <style:text-properties fo:background-color="#eeff41" loext:char-shading-value="0"/>
    </style:style>
    <style:style style:name="T53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54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55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6" style:family="text">
      <style:text-properties fo:color="#00e676" loext:opacity="100%"/>
    </style:style>
    <style:style style:name="T57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58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59" style:family="text">
      <style:text-properties fo:color="#00e676" loext:opacity="100%" fo:background-color="#000000" loext:char-shading-value="0"/>
    </style:style>
    <style:style style:name="T60" style:family="text">
      <style:text-properties fo:color="#00e676" loext:opacity="100%" fo:background-color="#000000" loext:char-shading-value="0"/>
    </style:style>
    <style:style style:name="T61" style:family="text">
      <style:text-properties fo:color="#5b2c6f" loext:opacity="100%" style:font-name="Arial" fo:font-size="11pt" style:font-name-asian="Arial3" style:font-size-asian="11pt" style:font-name-complex="Arial3" style:font-size-complex="11pt"/>
    </style:style>
    <style:style style:name="T62" style:family="text">
      <style:text-properties fo:color="#e0e0e0" loext:opacity="100%" fo:font-weight="bold" fo:background-color="#e040fb" loext:char-shading-value="0" style:font-weight-asian="bold" style:font-weight-complex="bold"/>
    </style:style>
    <style:style style:name="T63" style:family="text">
      <style:text-properties fo:color="#f8bbd0" loext:opacity="100%" fo:font-weight="bold" fo:background-color="#e040fb" loext:char-shading-value="0" style:font-weight-asian="bold" style:font-weight-complex="bold"/>
    </style:style>
    <style:style style:name="T64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65" style:family="text">
      <style:text-properties fo:color="#64ffd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16">二元樹（Binary Tree）</text:p>
      <text:p text:style-name="P4">完整學習筆記 — 超白話版</text:p>
      <text:p text:style-name="P28">含考場公式、考題解析、錯誤糾正、動畫級說明</text:p>
      <text:p text:style-name="P8"/>
      <text:p text:style-name="P8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>📌 本筆記適用範圍</text:p>
            <text:p text:style-name="P10"><text:s text:c="3"/>✔ 公職考試（高考 / 普考 / 各類特考）</text:p>
            <text:p text:style-name="P10"><text:s text:c="3"/>✔ 大學資料結構期末考</text:p>
            <text:p text:style-name="P10"><text:s text:c="3"/>✔ 從零開始學二元樹的讀者</text:p>
            <text:p text:style-name="P7"/>
            <text:p text:style-name="P10">📌 本筆記涵蓋</text:p>
            <text:p text:style-name="P10"><text:s text:c="3"/>✔ 圖片原始考試筆記逐行拆解與錯誤修正</text:p>
            <text:p text:style-name="P10"><text:s text:c="3"/>✔ 113 Q1、114 Q1、115 Q2、113 Q4 歷屆考題詳解</text:p>
            <text:p text:style-name="P10"><text:s text:c="3"/>✔ 所有公式推導（不跳步）</text:p>
            <text:p text:style-name="P10"><text:s text:c="3"/>✔ DFS（前序、中序、後序） ＋ BFS 完整說明</text:p>
            <text:p text:style-name="P10"><text:s text:c="3"/>✔ Heap、Priority Queue、陣列表示法</text:p>
            <text:p text:style-name="P10"><text:s text:c="3"/>✔ 唯一重建樹的完整步驟</text:p>
          </table:table-cell>
        </table:table-row>
      </table:table>
      <text:p text:style-name="P8"/>
      <text:p text:style-name="P8"/>
      <text:p text:style-name="Standard"/>
      <text:h text:style-name="P9" text:outline-level="1">第一章：從零開始 — 什麼是「樹」？</text:h>
      <text:p text:style-name="P25">在學任何公式之前，先把樹的形狀刻進腦子裡。</text:p>
      <text:h text:style-name="P2" text:outline-level="2">1.1 現實生活比喻</text:h>
      <text:p text:style-name="P25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7"><text:s text:c="9"/>爸爸 (root)</text:p>
            <text:p text:style-name="P17"><text:s text:c="8"/>/ <text:s text:c="4"/>\</text:p>
            <text:p text:style-name="P17"><text:s text:c="6"/>哥哥 <text:s text:c="4"/>姐姐</text:p>
            <text:p text:style-name="P17"><text:s text:c="6"/>/ <text:s/>\</text:p>
            <text:p text:style-name="P17"><text:s text:c="3"/>小明 <text:s/>小華</text:p>
          </table:table-cell>
        </table:table-row>
      </table:table>
      <text:p text:style-name="P25">這就是一棵樹。電腦科學裡的樹是倒過來的：根在最上面，葉子在最下面。</text:p>
      <text:p text:style-name="P8"/>
      <text:h text:style-name="P2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2">名詞（英文）</text:p>
            <text:p text:style-name="P12">root（根節點）</text:p>
            <text:p text:style-name="P12">child（子節點）</text:p>
            <text:p text:style-name="P12">parent（父節點）</text:p>
            <text:p text:style-name="P12">leaf（葉節點）</text:p>
            <text:p text:style-name="P15">degree（度數）</text:p>
            <text:p text:style-name="P12">edge / branch（邊）</text:p>
            <text:p text:style-name="P12">internal node（內部節點）</text:p>
            <text:p text:style-name="P12">subtree（子樹）</text:p>
            <text:p text:style-name="P12">forest（森林）</text:p>
          </table:table-cell>
          <table:table-cell table:style-name="表格3.B1" office:value-type="string">
            <text:p text:style-name="P12">說明</text:p>
            <text:p text:style-name="P26">最頂端的節點，只有一個</text:p>
            <text:p text:style-name="P26">往下連接的節點</text:p>
            <text:p text:style-name="P26">往上連接的節點</text:p>
            <text:p text:style-name="P26">degree = 0，沒有 child 的節點</text:p>
            <text:p text:style-name="P26"><text:span text:style-name="T6">一個節點有幾個 child</text:span>（<text:span text:style-name="T7">二元樹最多 = 2</text:span>）</text:p>
            <text:p text:style-name="P26">連接兩個節點的線；n 個節點 ⇒ n−1 條邊</text:p>
            <text:p text:style-name="P26">degree ≥ 1，還有子節點</text:p>
            <text:p text:style-name="P26">以任意節點為 root 往下看，本身也是一棵樹</text:p>
            <text:p text:style-name="P26">多棵樹放在一起就是森林</text:p>
          </table:table-cell>
        </table:table-row>
      </table:table>
      <text:p text:style-name="P8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9">⚠️ 重要：樹沒有環（Cycle）！</text:p>
            <text:p text:style-name="P29">若節點 A → B → C → A（繞回去），那就不叫樹，叫圖（Graph）。</text:p>
            <text:p text:style-name="P29">Tree 的定義：n 個節點、n−1 條邊、無環、連通。</text:p>
          </table:table-cell>
        </table:table-row>
      </table:table>
      <text:p text:style-name="Standard"/>
      <text:h text:style-name="P9" text:outline-level="1">第二章：Binary Tree（二元樹）</text:h>
      <text:h text:style-name="P2" text:outline-level="2">2.1 定義</text:h>
      <text:p text:style-name="P25"><text:span text:style-name="T9">每個節點最多只能有「兩個」子節點</text:span>：<text:span text:style-name="T11">左子節點（left child）</text:span>和<text:span text:style-name="T25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32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3"/>\</text:p>
                  <text:p text:style-name="P17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37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17"><text:s text:c="4"/>A</text:p>
                  <text:p text:style-name="P17"><text:s/>/ | \</text:p>
                  <text:p text:style-name="P17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8"/>
      <text:h text:style-name="P2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>公式1：分支數（branch）= n − 1</text:p>
            <text:p text:style-name="P10"><text:s text:c="2"/>→<text:span text:style-name="T20"> n 個節點</text:span>的二元樹，共有 <text:span text:style-name="T25">n−1 條邊</text:span></text:p>
            <text:p text:style-name="P7"/>
            <text:p text:style-name="P10">公式2：葉節點（n0） = 度數為2的節點（n2） + 1</text:p>
            <text:p text:style-name="P10"><text:s text:c="2"/>→ n0 = n2 + 1 <text:s text:c="2"/>← 圖片原始考試筆記中隱含的超重要公式！</text:p>
            <text:p text:style-name="P7"/>
            <text:p text:style-name="P10">公式3：Full Binary Tree（滿二元樹）最大節點數 = 2^h − 1</text:p>
            <text:p text:style-name="P10"><text:s text:c="2"/>→ 高度 h 時，每層全滿</text:p>
            <text:p text:style-name="P7"/>
            <text:p text:style-name="P10">公式4：2^(h−1) ≤ n ≤ 2^h − 1</text:p>
            <text:p text:style-name="P10"><text:s text:c="2"/>→ 高度 h 的二元樹，節點數範圍</text:p>
          </table:table-cell>
        </table:table-row>
      </table:table>
      <text:p text:style-name="P8"/>
      <text:h text:style-name="P2" text:outline-level="2">2.3 公式2 的推導（n0 = n2 + 1）</text:h>
      <text:p text:style-name="P21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1">這個公式的意思是：</text:p>
            <text:p text:style-name="P11">「葉節點的數量」永遠等於「有兩個小孩的節點數量」加 1。</text:p>
            <text:p text:style-name="P22"/>
            <text:p text:style-name="P11">公式本身只有一行： <text:s/>n₀ = n₂ + 1</text:p>
            <text:p text:style-name="P11">但直接背沒有用——考試會換各種方向問，所以要真正懂推導過程。</text:p>
          </table:table-cell>
        </table:table-row>
      </table:table>
      <text:p text:style-name="P21"/>
      <text:p text:style-name="P40">第一步：先把 degree（度數）看懂</text:p>
      <text:p text:style-name="P55"><text:span text:style-name="T27">degree = 一個節點有幾個小孩（child）</text:span>。二元樹最多 2 個。</text:p>
      <text:p text:style-name="P55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8"><text:s text:c="8"/>A <text:s text:c="7"/>← degree(A) = 2 <text:s text:c="2"/>（有 B、C 兩個小孩）</text:p>
            <text:p text:style-name="P18"><text:s text:c="7"/>/ \</text:p>
            <text:p text:style-name="P23"><text:soft-page-break/><text:span text:style-name="T4"><text:s text:c="6"/>B <text:s text:c="2"/>C <text:s text:c="5"/>← degree(C) = 0 <text:s text:c="2"/>（沒小孩，是葉子）</text:span></text:p>
            <text:p text:style-name="P18"><text:s text:c="5"/>/</text:p>
            <text:p text:style-name="P18"><text:s text:c="4"/>D <text:s text:c="11"/>← degree(B) = 1 <text:s text:c="2"/>（只有 D 一個小孩）</text:p>
            <text:p text:style-name="P18"><text:s text:c="17"/>← degree(D) = 0 <text:s text:c="2"/>（沒小孩，是葉子）</text:p>
          </table:table-cell>
        </table:table-row>
      </table:table>
      <text:p text:style-name="P21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59">定義</text:p>
          </table:table-cell>
          <table:table-cell table:style-name="表格57.B1" office:value-type="string">
            <text:p text:style-name="P56"><text:span text:style-name="T41">n₀ <text:s/>= degree 為 0 的節點數</text:span> <text:s/>→ 葉節點（Leaf）</text:p>
            <text:p text:style-name="P56"><text:span text:style-name="T20">n₁ <text:s/>= degree 為 1 的節點數</text:span> <text:s/>→ 只有一個小孩的節點</text:p>
            <text:p text:style-name="P56"><text:span text:style-name="T25">n₂ <text:s/>= degree 為 2 的節點數</text:span> <text:s/>→ 有兩個小孩的節點</text:p>
          </table:table-cell>
        </table:table-row>
      </table:table>
      <text:p text:style-name="P21"/>
      <text:p text:style-name="P55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8"><text:s text:c="2"/>n₀ = 2 <text:s/>（<text:span text:style-name="T46">C 和 D 是葉子</text:span>）</text:p>
            <text:p text:style-name="P18"><text:s text:c="2"/>n₁ = 1 <text:s/>（<text:span text:style-name="T46">B 只有一個小孩</text:span>）</text:p>
            <text:p text:style-name="P18"><text:s text:c="2"/>n₂ = 1 <text:s/>（<text:span text:style-name="T46">A 有兩個小孩</text:span>）</text:p>
            <text:p text:style-name="P18"><text:s text:c="2"/>驗證：n₀ = n₂ + 1 <text:s/>→ <text:s/>2 = 1 + 1 <text:s/>✔</text:p>
          </table:table-cell>
        </table:table-row>
      </table:table>
      <text:p text:style-name="P21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59">步驟 1</text:p>
          </table:table-cell>
          <table:table-cell table:style-name="表格59.B1" office:value-type="string">
            <text:p text:style-name="P56"><text:span text:style-name="T27">總節點數 = 三種度數節點加起來</text:span>：</text:p>
            <text:p text:style-name="P56">n <text:s/>= <text:s/>n₀ + n₁ + n₂</text:p>
          </table:table-cell>
        </table:table-row>
      </table:table>
      <text:p text:style-name="P21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59">步驟 2</text:p>
          </table:table-cell>
          <table:table-cell table:style-name="表格60.B1" office:value-type="string">
            <text:p text:style-name="P56">從「節點個數」看邊數：</text:p>
            <text:p text:style-name="P22"/>
            <text:p text:style-name="P56">樹有一個性質：<text:span text:style-name="T12">n 個節點，一定有 n−1 條邊</text:span>。</text:p>
            <text:p text:style-name="P56">（因為<text:span text:style-name="T20">每條邊都連著一個被連過來的節點</text:span>，<text:span text:style-name="T29">除了 root 每個人都有一條邊連著自己</text:span>）</text:p>
            <text:p text:style-name="P22"/>
            <text:p text:style-name="P58"><text:s text:c="2"/>▶ <text:span text:style-name="T48">邊數 <text:s/>= <text:s/>n(</text:span><text:span text:style-name="T50">n 個節點</text:span><text:span text:style-name="T48">) − 1 </text:span><text:s text:c="8"/>← 第一個邊數公式</text:p>
          </table:table-cell>
        </table:table-row>
      </table:table>
      <text:p text:style-name="P21"/>
      <text:p text:style-name="P55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8"><text:s text:c="2"/>1 個節點 <text:s/>→ <text:s/>0 條邊 <text:s text:c="3"/>(1 - 1 = 0) ✔</text:p>
            <text:p text:style-name="P18"><text:s text:c="2"/>2 個節點 <text:s/>→ <text:s/>1 條邊 <text:s text:c="3"/>(2 - 1 = 1) ✔</text:p>
            <text:p text:style-name="P18"><text:s text:c="2"/>4 個節點 <text:s/>→ <text:s/>3 條邊 <text:s text:c="3"/>(4 - 1 = 3) ✔</text:p>
          </table:table-cell>
        </table:table-row>
      </table:table>
      <text:p text:style-name="P21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59">步驟 3</text:p>
          </table:table-cell>
          <table:table-cell table:style-name="表格62.B1" office:value-type="string">
            <text:p text:style-name="P56">從「<text:span text:style-name="T9">每個節點往下伸出幾條線</text:span>」<text:span text:style-name="T13">看邊數</text:span>：</text:p>
            <text:p text:style-name="P22"/>
            <text:p text:style-name="P56">換個角度——<text:span text:style-name="T42">每個節點都可以向下「貢獻」它的子邊</text:span>：</text:p>
            <text:p text:style-name="P56"><text:s text:c="2"/>• degree = 0 的節點（葉子） <text:s text:c="2"/>→ 貢獻 <text:s/>0 <text:s/>條邊</text:p>
            <text:p text:style-name="P56"><text:s text:c="2"/>• degree = 1 的節點 <text:s text:c="10"/>→ 貢獻 <text:s/>1 <text:s/>條邊</text:p>
            <text:p text:style-name="P56"><text:s text:c="2"/>• degree = 2 的節點 <text:s text:c="10"/>→ 貢獻 <text:s/>2 <text:s/>條邊</text:p>
            <text:p text:style-name="P22"/>
            <text:p text:style-name="P56"><text:span text:style-name="T27">把全部節點的貢獻加起來，就是樹的總邊數</text:span>：</text:p>
            <text:p text:style-name="P22"><text:soft-page-break/></text:p>
            <text:p text:style-name="P56"><text:s text:c="2"/>▶ <text:span text:style-name="T12">邊數</text:span> <text:s/>= <text:s/><text:span text:style-name="T12">0</text:span>×n₀ <text:s/>+ <text:s/><text:span text:style-name="T12">1</text:span>×n₁ <text:s/>+ <text:s/><text:span text:style-name="T12">2</text:span>×n₂ <text:s text:c="2"/>← 第二個邊數公式</text:p>
          </table:table-cell>
        </table:table-row>
      </table:table>
      <text:p text:style-name="P21"/>
      <text:p text:style-name="P55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8"><text:s text:c="2"/>A 有兩個小孩 B、C <text:s/>→ <text:s/>A 往下伸出 2 條線</text:p>
            <text:p text:style-name="P18"><text:s text:c="2"/>┌─── A ───┐</text:p>
            <text:p text:style-name="P18"><text:s text:c="2"/>│ <text:s text:c="8"/>│</text:p>
            <text:p text:style-name="P18"><text:s text:c="2"/>B <text:s text:c="8"/>C <text:s text:c="3"/>← A 貢獻了 2 條邊（A→B、A→C）</text:p>
            <text:p text:style-name="P23"/>
            <text:p text:style-name="P18"><text:s text:c="2"/>B 有一個小孩 D <text:s/>→ <text:s/>B 往下伸出 1 條線</text:p>
            <text:p text:style-name="P18"><text:s text:c="2"/>B</text:p>
            <text:p text:style-name="P18"><text:s text:c="2"/>│</text:p>
            <text:p text:style-name="P18"><text:s text:c="2"/>D <text:s text:c="13"/>← B 貢獻了 1 條邊（B→D）</text:p>
            <text:p text:style-name="P23"/>
            <text:p text:style-name="P18"><text:s text:c="2"/>C、D 沒有小孩 <text:s/>→ <text:s/>各貢獻 0 條邊</text:p>
            <text:p text:style-name="P23"/>
            <text:p text:style-name="P18"><text:s text:c="2"/>全部加起來：2 + 1 + 0 + 0 = 3 條邊 <text:s/>= <text:s/>n−1 = 4−1 = 3 <text:s/>✔</text:p>
          </table:table-cell>
        </table:table-row>
      </table:table>
      <text:p text:style-name="P21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59">步驟 4</text:p>
          </table:table-cell>
          <table:table-cell table:style-name="表格64.B1" office:value-type="string">
            <text:p text:style-name="P56">兩個邊數公式算的是同一件事，所以畫等號：</text:p>
            <text:p text:style-name="P60"/>
            <text:p text:style-name="P56"><text:s/><text:span text:style-name="T39"><text:s/></text:span><text:span text:style-name="T27">n − 1 <text:s/>= <text:s/>0×n₀ <text:s/>+ <text:s/>1×n₁ <text:s/>+ <text:s/>2×n₂</text:span></text:p>
            <text:p text:style-name="P22"/>
            <text:p text:style-name="P56">把 n = n₀ + n₁ + n₂ 代入左邊：</text:p>
            <text:p text:style-name="P22"/>
            <text:p text:style-name="P56"><text:s text:c="2"/>n₀ + n₁ + n₂ − 1 <text:s/>= <text:s/>n₁ + 2n₂</text:p>
          </table:table-cell>
        </table:table-row>
      </table:table>
      <text:p text:style-name="P21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59">步驟 5</text:p>
          </table:table-cell>
          <table:table-cell table:style-name="表格65.B1" office:value-type="string">
            <text:p text:style-name="P56">整理數學式（兩邊同時消去 n₁）：</text:p>
            <text:p text:style-name="P22"/>
            <text:p text:style-name="P56"><text:s text:c="2"/>n₀ + n₁ + n₂ − 1 <text:s/>= <text:s/>n₁ + 2n₂</text:p>
            <text:p text:style-name="P56"><text:s text:c="2"/>↓ <text:s/>兩邊減去 n₁</text:p>
            <text:p text:style-name="P56"><text:s text:c="2"/>n₀ + n₂ − 1 <text:s/>= <text:s/>2n₂</text:p>
            <text:p text:style-name="P56"><text:s text:c="2"/>↓ <text:s/>移項</text:p>
            <text:p text:style-name="P56"><text:s text:c="2"/>n₀ <text:s/>= <text:s/>2n₂ − n₂ + 1 <text:s/>= <text:s/>n₂ + 1</text:p>
            <text:p text:style-name="P22"/>
            <text:p text:style-name="P56"><text:s text:c="2"/>▶ <text:s/>n₀ = n₂ + 1 <text:s text:c="3"/>✔ 得證！</text:p>
          </table:table-cell>
        </table:table-row>
      </table:table>
      <text:p text:style-name="P21"/>
      <text:p text:style-name="P40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4">定義</text:p>
          </table:table-cell>
          <table:table-cell table:style-name="表格66.B1" office:value-type="string">
            <text:p text:style-name="P57"><text:span text:style-name="T32">n₀ = 葉節點數</text:span>；<text:span text:style-name="T34">n₁ = degree-1 節點數</text:span>；<text:span text:style-name="T36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4">步驟1</text:p>
          </table:table-cell>
          <table:table-cell table:style-name="表格66.B2" office:value-type="string">
            <text:p text:style-name="P61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4">步驟2</text:p>
          </table:table-cell>
          <table:table-cell table:style-name="表格66.B3" office:value-type="string">
            <text:p text:style-name="P57"><text:span text:style-name="T26">邊數 = n − 1</text:span>（<text:span text:style-name="T25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4">步驟3</text:p>
          </table:table-cell>
          <table:table-cell table:style-name="表格66.B4" office:value-type="string">
            <text:p text:style-name="P57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4">步驟4</text:p>
          </table:table-cell>
          <table:table-cell table:style-name="表格66.B5" office:value-type="string">
            <text:p text:style-name="P57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4">步驟5</text:p>
          </table:table-cell>
          <table:table-cell table:style-name="表格66.B6" office:value-type="string">
            <text:p text:style-name="P57">消去 n₁ 後移項：<text:span text:style-name="T27">n₀ = n₂ + 1</text:span> <text:s/>✔</text:p>
          </table:table-cell>
        </table:table-row>
      </table:table>
      <text:p text:style-name="P21"/>
      <text:p text:style-name="P40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35">題型：某二元樹<text:span text:style-name="T46">有 20 個 degree=2 的節點</text:span>，請問<text:span text:style-name="T48">有幾個葉節點</text:span>？</text:p>
            <text:p text:style-name="P22"/>
            <text:p text:style-name="P35"><text:s text:c="2"/>直接套公式：n₀ = n₂ + 1 = 20 + 1 = 21 個</text:p>
            <text:p text:style-name="P22"/>
            <text:p text:style-name="P35">反過來也可以：若已知葉節點 15 個，則 degree=2 的節點有 15 − 1 = 14 個</text:p>
          </table:table-cell>
        </table:table-row>
      </table:table>
      <text:p text:style-name="P21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0">⚠️ <text:span text:style-name="T13">此公式僅適用於 Binary Tree（二元樹）！</text:span></text:p>
            <text:p text:style-name="P22"/>
            <text:p text:style-name="P30">因為二元樹的 degree 最多為 2，只有 n₀、n₁、n₂ 三種情況。</text:p>
            <text:p text:style-name="P30">若是一般樹（degree 可以是 3、4、5…），這個推導就不成立，必須重新列方程式。</text:p>
          </table:table-cell>
        </table:table-row>
      </table:table>
      <text:h text:style-name="P3" text:outline-level="2"/>
      <text:p text:style-name="P8"/>
      <text:h text:style-name="P2" text:outline-level="2">2.4 公式3 的推導（<text:span text:style-name="T30">2^h − 1</text:span>）</text:h>
      <text:p text:style-name="P25"><text:span text:style-name="T20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7">第1層：1 = 2^0</text:p>
            <text:p text:style-name="P17">第2層：2 = 2^1</text:p>
            <text:p text:style-name="P17">第3層：4 = 2^2</text:p>
            <text:p text:style-name="P17"><text:s text:c="2"/>...</text:p>
            <text:p text:style-name="P17">第h層：2^(h-1)</text:p>
            <text:p text:style-name="P19">總和 <text:s/>= 1 + 2 + 4 + ... + 2^(h-1) = <text:span text:style-name="T27">2^h − 1 </text:span><text:span text:style-name="T15">(Full Binary Tree（滿二元樹）</text:span><text:span text:style-name="T53">最大節點數 = 2^h − 1</text:span><text:span text:style-name="T15"> → </text:span><text:span text:style-name="T54">高度 h 時，每層全滿</text:span><text:span text:style-name="T15">)</text:span></text:p>
          </table:table-cell>
        </table:table-row>
      </table:table>
      <text:p text:style-name="P8"/>
      <text:h text:style-name="P2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9">⚠️ 高度定義有兩種，考試務必看清楚題目！</text:p>
            <text:p text:style-name="P7"/>
            <text:p text:style-name="P29"><text:span text:style-name="T34">定義一：root 算第 1 層</text:span> → 只有 root 的樹，高度 = 1</text:p>
            <text:p text:style-name="P29"><text:span text:style-name="T34">定義二：root 算第 0 層</text:span> → 只有 root 的樹，高度 = 0</text:p>
            <text:p text:style-name="P7"/>
            <text:p text:style-name="P29">兩種定義差 1，公式結果會不同！</text:p>
          </table:table-cell>
        </table:table-row>
      </table:table>
      <text:p text:style-name="Standard"/>
      <text:h text:style-name="P9" text:outline-level="1">第三章：Binary Search Tree（BST，二元搜尋樹）</text:h>
      <text:h text:style-name="P2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左子樹的所有值 &lt; 根節點值 &lt; 右子樹的所有值</text:p>
            <text:p text:style-name="P34">（<text:span text:style-name="T27">左小、根中、右大</text:span>）</text:p>
          </table:table-cell>
        </table:table-row>
      </table:table>
      <text:p text:style-name="P8"/>
      <text:h text:style-name="P2" text:outline-level="2">3.2 BST 插入範例</text:h>
      <text:p text:style-name="P25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7">插入 50： <text:s text:c="10"/>插入 30（&lt;50 往左）： <text:s text:c="2"/>插入 80（&gt;50 往右）：</text:p>
            <text:p text:style-name="P17"><text:s text:c="3"/>50 <text:s text:c="18"/>50 <text:s text:c="20"/>50</text:p>
            <text:p text:style-name="P17"><text:s text:c="23"/>/ <text:s text:c="21"/>/ <text:s/>\</text:p>
            <text:p text:style-name="P17"><text:s text:c="22"/>30 <text:s text:c="19"/>30 <text:s text:c="3"/>80</text:p>
            <text:p text:style-name="P8"/>
            <text:p text:style-name="P17">插入 40（&gt;30 往右）： <text:s/>插入 20（&lt;30 往左）： <text:s/>插入 60（&gt;50 但&lt;80）：</text:p>
            <text:p text:style-name="P17"><text:s text:c="6"/>50 <text:s text:c="18"/>50 <text:s text:c="19"/>50</text:p>
            <text:p text:style-name="P17"><text:s text:c="5"/>/ <text:s/>\ <text:s text:c="16"/>/ <text:s/>\ <text:s text:c="16"/>/ <text:s/>\</text:p>
            <text:p text:style-name="P17"><text:s text:c="3"/>30 <text:s text:c="3"/>80 <text:s text:c="13"/>30 <text:s text:c="3"/>80 <text:s text:c="12"/>30 <text:s text:c="3"/>80</text:p>
            <text:p text:style-name="P17"><text:s text:c="5"/>\ <text:s text:c="17"/>/ \ <text:s text:c="17"/>/ \ <text:s text:c="2"/>/</text:p>
            <text:p text:style-name="P17"><text:s text:c="5"/>40 <text:s text:c="15"/>20 <text:s/>40 <text:s text:c="13"/>20 <text:s/>40 60</text:p>
          </table:table-cell>
        </table:table-row>
      </table:table>
      <text:p text:style-name="P8"/>
      <text:h text:style-name="P2" text:outline-level="2">3.3 BST 刪除（三種情況）</text:h>
      <text:p text:style-name="P39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7">刪除 20：直接移除，父節點的 left 指向 NULL</text:p>
          </table:table-cell>
        </table:table-row>
      </table:table>
      <text:p text:style-name="P39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7">刪除 30（只有右子樹 40）：</text:p>
            <text:p text:style-name="P17"><text:s text:c="3"/>50 <text:s text:c="15"/>50</text:p>
            <text:p text:style-name="P17"><text:s text:c="2"/>/ <text:s/>\ <text:s text:c="6"/>→ <text:s text:c="5"/>/ <text:s/>\</text:p>
            <text:p text:style-name="P17">30 <text:s text:c="3"/>80 <text:s text:c="11"/>40 <text:s text:c="2"/>80</text:p>
            <text:p text:style-name="P17"><text:s text:c="2"/>\</text:p>
            <text:p text:style-name="P17"><text:s text:c="2"/>40</text:p>
          </table:table-cell>
        </table:table-row>
      </table:table>
      <text:p text:style-name="P39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7">刪除 50（有左右子樹）：</text:p>
            <text:p text:style-name="P17">方法一：<text:span text:style-name="T55">找右子樹最小值（60）來取代 50</text:span></text:p>
            <text:p text:style-name="P17">方法二：<text:span text:style-name="T57">找左子樹最大值（40）來取代 50</text:span></text:p>
            <text:p text:style-name="P8"/>
            <text:p text:style-name="P17">以方法一為例：</text:p>
            <text:p text:style-name="P17"><text:s text:c="7"/>50 <text:s text:c="18"/>60</text:p>
            <text:p text:style-name="P17"><text:s text:c="6"/>/ <text:s/>\ <text:s text:c="7"/>→ <text:s text:c="7"/>/ <text:s/>\</text:p>
            <text:p text:style-name="P8"><text:soft-page-break/><text:span text:style-name="T4"><text:s text:c="4"/>30 <text:s text:c="3"/>80 <text:s text:c="12"/>30 <text:s text:c="3"/>80</text:span></text:p>
            <text:p text:style-name="P17"><text:s text:c="4"/>/ \ <text:s text:c="2"/>/ <text:s text:c="13"/>/ \</text:p>
            <text:p text:style-name="P17"><text:s text:c="3"/>20 40 60 <text:s text:c="12"/>20 <text:s/>40</text:p>
          </table:table-cell>
        </table:table-row>
      </table:table>
      <text:p text:style-name="P8"/>
      <text:h text:style-name="P62" text:outline-level="2">3.4　BST 退化問題</text:h>
      <text:p text:style-name="P69"><text:span text:style-name="T14">BST 搜尋快的前提是「每次比較都能砍掉一半」</text:span>，<text:span text:style-name="T28">但這個前提要求樹夠平均</text:span>。若<text:span text:style-name="T21">插入順序不佳，樹會退化成直線</text:span>。</text:p>
      <text:p text:style-name="P51"/>
      <text:p text:style-name="P71">退化的三種情況</text:p>
      <text:p text:style-name="P77">① 遞增插入 → 右偏斜樹</text:p>
      <text:p text:style-name="P69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80">1</text:p>
            <text:p text:style-name="P80"><text:s/>\</text:p>
            <text:p text:style-name="P80"><text:s text:c="2"/>2</text:p>
            <text:p text:style-name="P80"><text:s text:c="3"/>\</text:p>
            <text:p text:style-name="P80"><text:s text:c="4"/>3 <text:s/>← 搜尋<text:span text:style-name="T47">效率退化為 O(n)</text:span>，不再是 O(log n)</text:p>
            <text:p text:style-name="P80"><text:s text:c="5"/>\</text:p>
            <text:p text:style-name="P80"><text:s text:c="6"/>4</text:p>
            <text:p text:style-name="P80"><text:s text:c="7"/>\</text:p>
            <text:p text:style-name="P80"><text:s text:c="8"/>5</text:p>
          </table:table-cell>
        </table:table-row>
      </table:table>
      <text:p text:style-name="P51"/>
      <text:p text:style-name="P77">② 遞減插入 → 左偏斜樹</text:p>
      <text:p text:style-name="P69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0"><text:s text:c="8"/>5</text:p>
            <text:p text:style-name="P80"><text:s text:c="7"/>/</text:p>
            <text:p text:style-name="P80"><text:s text:c="6"/>4</text:p>
            <text:p text:style-name="P80"><text:s text:c="5"/>/</text:p>
            <text:p text:style-name="P80"><text:s text:c="4"/>3</text:p>
            <text:p text:style-name="P80"><text:s text:c="3"/>/</text:p>
            <text:p text:style-name="P80"><text:s text:c="2"/>2</text:p>
            <text:p text:style-name="P80"><text:s/>/</text:p>
            <text:p text:style-name="P80">1</text:p>
          </table:table-cell>
        </table:table-row>
      </table:table>
      <text:p text:style-name="P51"/>
      <text:p text:style-name="P77">③ 鋸齒插入 → 看起來平衡，其實歪了</text:p>
      <text:p text:style-name="P69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80"><text:s text:c="8"/>10</text:p>
            <text:p text:style-name="P80"><text:s text:c="7"/>/</text:p>
            <text:p text:style-name="P80"><text:s text:c="6"/>1</text:p>
            <text:p text:style-name="P80"><text:s text:c="7"/>\</text:p>
            <text:p text:style-name="P80"><text:s text:c="8"/>9</text:p>
            <text:p text:style-name="P80"><text:s text:c="7"/>/</text:p>
            <text:p text:style-name="P52"><text:soft-page-break/><text:span text:style-name="T4"><text:s text:c="6"/>2</text:span></text:p>
            <text:p text:style-name="P80"><text:s text:c="7"/>\</text:p>
            <text:p text:style-name="P80"><text:s text:c="8"/>8</text:p>
            <text:p text:style-name="P80"><text:s text:c="7"/>/</text:p>
            <text:p text:style-name="P80"><text:s text:c="6"/>3 <text:s text:c="7"/>← 長歪但不明顯，一樣退化</text:p>
          </table:table-cell>
        </table:table-row>
      </table:table>
      <text:p text:style-name="P51"/>
      <text:p text:style-name="P71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82">操作</text:p>
          </table:table-cell>
          <table:table-cell table:style-name="表格69.A1" office:value-type="string">
            <text:p text:style-name="P82"><text:span text:style-name="T47">正常</text:span> BST（平衡）</text:p>
          </table:table-cell>
          <table:table-cell table:style-name="表格69.A1" office:value-type="string">
            <text:p text:style-name="P82"><text:span text:style-name="T49">退化</text:span> BST</text:p>
          </table:table-cell>
        </table:table-row>
        <table:table-row table:style-name="表格69.1">
          <table:table-cell table:style-name="表格69.A2" office:value-type="string">
            <text:p text:style-name="P69">搜尋</text:p>
          </table:table-cell>
          <table:table-cell table:style-name="表格69.B2" office:value-type="string">
            <text:p text:style-name="P87">O(<text:span text:style-name="T47">log n</text:span>)</text:p>
          </table:table-cell>
          <table:table-cell table:style-name="表格69.C2" office:value-type="string">
            <text:p text:style-name="P92">O(n)</text:p>
          </table:table-cell>
        </table:table-row>
        <table:table-row table:style-name="表格69.1">
          <table:table-cell table:style-name="表格69.A3" office:value-type="string">
            <text:p text:style-name="P69">插入</text:p>
          </table:table-cell>
          <table:table-cell table:style-name="表格69.B2" office:value-type="string">
            <text:p text:style-name="P87">O(<text:span text:style-name="T47">log n</text:span>)</text:p>
          </table:table-cell>
          <table:table-cell table:style-name="表格69.C2" office:value-type="string">
            <text:p text:style-name="P92">O(n)</text:p>
          </table:table-cell>
        </table:table-row>
        <table:table-row table:style-name="表格69.1">
          <table:table-cell table:style-name="表格69.A4" office:value-type="string">
            <text:p text:style-name="P69">刪除</text:p>
          </table:table-cell>
          <table:table-cell table:style-name="表格69.B2" office:value-type="string">
            <text:p text:style-name="P87">O(<text:span text:style-name="T47">log n</text:span>)</text:p>
          </table:table-cell>
          <table:table-cell table:style-name="表格69.C2" office:value-type="string">
            <text:p text:style-name="P92">O(n)</text:p>
          </table:table-cell>
        </table:table-row>
      </table:table>
      <text:p text:style-name="P51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85">📊 實際感受：10 萬筆資料</text:p>
            <text:p text:style-name="P85"><text:s/><text:span text:style-name="T28"><text:s/>正常 BST（平衡）：約 log₂(100000) ≈ 17 步找到</text:span></text:p>
            <text:p text:style-name="P85"><text:s text:c="2"/>退化 BST：最多 100,000 步 ← 慢了將近 6000 倍！</text:p>
          </table:table-cell>
        </table:table-row>
      </table:table>
      <text:p text:style-name="P51"/>
      <text:h text:style-name="P62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78"><text:span text:style-name="T35">偏斜樹</text:span> = <text:span text:style-name="T14">所有節點只有左子節點，或只有右子節點</text:span></text:p>
            <text:p text:style-name="P78">→ <text:span text:style-name="T21">形狀等同 Linked List</text:span></text:p>
            <text:p text:style-name="P78">→ 高度 h 時只有 h 個節點（最少）</text:p>
          </table:table-cell>
        </table:table-row>
      </table:table>
      <text:p text:style-name="P51"/>
      <text:p text:style-name="P69">如果<text:span text:style-name="T64">用陣列儲存</text:span><text:span text:style-name="T37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80">節點1 在 index=1</text:p>
            <text:p text:style-name="P80">節點2 在 index=3 <text:s/>（1 的右子 = <text:span text:style-name="T33">2×1+1</text:span> = 3）</text:p>
            <text:p text:style-name="P80">節點3 在 index=7 <text:s/>（3 的右子 = <text:span text:style-name="T33">2×3+1</text:span> = 7）</text:p>
            <text:p text:style-name="P80">節點4 在 index=15 （7 的右子 = <text:span text:style-name="T33">2×7+1</text:span> = 15）</text:p>
            <text:p text:style-name="P80">節點5 在 index=31 （15的右子 = <text:span text:style-name="T33">2×15+1</text:span> = 31）</text:p>
            <text:p text:style-name="P52"/>
            <text:p text:style-name="P80">陣列：</text:p>
            <text:p text:style-name="P80">index: <text:s/>1 <text:s/>2 <text:s/>3 <text:s/>4 <text:s/>5 <text:s/>6 <text:s/>7 <text:s/>8 ... 14 <text:s/>15 <text:s/>16 ... 30 <text:s/>31</text:p>
            <text:p text:style-name="P80">value: <text:s/>1 <text:s/>- <text:s/>2 <text:s/>- <text:s/>- <text:s/>- <text:s/>3 <text:s/>- <text:s/>... <text:s/>- 4 <text:s text:c="2"/>- <text:s/>... <text:s/>- <text:s text:c="2"/>5</text:p>
            <text:p text:style-name="P80"><text:s text:c="14"/>↑ <text:s text:c="10"/>↑ <text:s text:c="11"/>↑ <text:s text:c="14"/>↑</text:p>
            <text:p text:style-name="P80"><text:s text:c="13"/>節點2 <text:s text:c="6"/>節點3 <text:s text:c="7"/>節點4 <text:s text:c="11"/>節點5</text:p>
            <text:p text:style-name="P52"/>
            <text:p text:style-name="P80"><text:span text:style-name="T58">5 個節點，卻佔用 2^5 - 1 = 31 格</text:span>，<text:span text:style-name="T43">浪費 26 格！</text:span></text:p>
          </table:table-cell>
        </table:table-row>
      </table:table>
      <text:p text:style-name="P51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82">節點數 n</text:p>
          </table:table-cell>
          <table:table-cell table:style-name="表格73.A1" office:value-type="string">
            <text:p text:style-name="P82">需要陣列格數</text:p>
          </table:table-cell>
          <table:table-cell table:style-name="表格73.A1" office:value-type="string">
            <text:p text:style-name="P82">浪費格數</text:p>
          </table:table-cell>
          <table:table-cell table:style-name="表格73.A1" office:value-type="string">
            <text:p text:style-name="P82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69">3</text:p>
          </table:table-cell>
          <table:table-cell table:style-name="表格73.B2" office:value-type="string">
            <text:p text:style-name="P69">7</text:p>
          </table:table-cell>
          <table:table-cell table:style-name="表格73.C2" office:value-type="string">
            <text:p text:style-name="P93">4</text:p>
          </table:table-cell>
          <table:table-cell table:style-name="表格73.C2" office:value-type="string">
            <text:p text:style-name="P94">43%</text:p>
          </table:table-cell>
        </table:table-row>
        <table:table-row table:style-name="表格73.1">
          <table:table-cell table:style-name="表格73.A3" office:value-type="string">
            <text:p text:style-name="P69">5</text:p>
          </table:table-cell>
          <table:table-cell table:style-name="表格73.B3" office:value-type="string">
            <text:p text:style-name="P69">31</text:p>
          </table:table-cell>
          <table:table-cell table:style-name="表格73.C2" office:value-type="string">
            <text:p text:style-name="P93">26</text:p>
          </table:table-cell>
          <table:table-cell table:style-name="表格73.C2" office:value-type="string">
            <text:p text:style-name="P94">16%</text:p>
          </table:table-cell>
        </table:table-row>
        <table:table-row table:style-name="表格73.1">
          <table:table-cell table:style-name="表格73.A4" office:value-type="string">
            <text:p text:style-name="P69">10</text:p>
          </table:table-cell>
          <table:table-cell table:style-name="表格73.B4" office:value-type="string">
            <text:p text:style-name="P69">1,023</text:p>
          </table:table-cell>
          <table:table-cell table:style-name="表格73.C2" office:value-type="string">
            <text:p text:style-name="P93">1,013</text:p>
          </table:table-cell>
          <table:table-cell table:style-name="表格73.C2" office:value-type="string">
            <text:p text:style-name="P94">&lt; 1%</text:p>
          </table:table-cell>
        </table:table-row>
      </table:table>
      <text:p text:style-name="P51"/>
      <text:h text:style-name="P62" text:outline-level="2">3.6　<text:span text:style-name="T49">解決方法：平衡樹</text:span></text:h>
      <text:p text:style-name="P69"><text:span text:style-name="T28">只要讓樹「自動保持平衡」</text:span>，<text:span text:style-name="T14">就能確保搜尋永遠是 O(log n)</text:span>。</text:p>
      <text:p text:style-name="P51"/>
      <text:p text:style-name="P71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73">強制規定：任何節點的左右子樹高度差 ≤ 1</text:p>
            <text:p text:style-name="P73">違反時立即「旋轉」調整</text:p>
          </table:table-cell>
        </table:table-row>
      </table:table>
      <text:p text:style-name="P69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95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80"><text:s text:c="2"/>1 <text:s text:c="3"/>← 左子樹高度=0</text:p>
                  <text:p text:style-name="P80"><text:s/>\ <text:s text:c="4"/>← 右子樹高度=2，差值=2！</text:p>
                  <text:p text:style-name="P80"><text:s text:c="2"/>2</text:p>
                  <text:p text:style-name="P80"><text:s/>\</text:p>
                  <text:p text:style-name="P80"><text:s text:c="2"/>3</text:p>
                </table:table-cell>
              </table:table-row>
            </table:table>
            <text:p text:style-name="P53"/>
          </table:table-cell>
          <table:table-cell table:style-name="表格75.B1" office:value-type="string">
            <text:p text:style-name="P88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80"><text:s text:c="4"/>2 <text:s text:c="2"/>← 左右子樹高度各=1</text:p>
                  <text:p text:style-name="P80"><text:s text:c="3"/>/ \</text:p>
                  <text:p text:style-name="P80"><text:s text:c="2"/>1 <text:s text:c="2"/>3</text:p>
                </table:table-cell>
              </table:table-row>
            </table:table>
            <text:p text:style-name="P53"/>
          </table:table-cell>
        </table:table-row>
      </table:table>
      <text:p text:style-name="P51"/>
      <text:p text:style-name="P69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82">旋轉類型</text:p>
          </table:table-cell>
          <table:table-cell table:style-name="表格78.A1" office:value-type="string">
            <text:p text:style-name="P82">發生條件</text:p>
          </table:table-cell>
          <table:table-cell table:style-name="表格78.A1" office:value-type="string">
            <text:p text:style-name="P82">操作</text:p>
          </table:table-cell>
        </table:table-row>
        <table:table-row table:style-name="表格78.1">
          <table:table-cell table:style-name="表格78.A2" office:value-type="string">
            <text:p text:style-name="P68">LL 旋轉</text:p>
          </table:table-cell>
          <table:table-cell table:style-name="表格78.B2" office:value-type="string">
            <text:p text:style-name="P69">新節點在左子樹的左邊</text:p>
          </table:table-cell>
          <table:table-cell table:style-name="表格78.C2" office:value-type="string">
            <text:p text:style-name="P69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68">RR 旋轉</text:p>
          </table:table-cell>
          <table:table-cell table:style-name="表格78.B3" office:value-type="string">
            <text:p text:style-name="P69">新節點在右子樹的右邊</text:p>
          </table:table-cell>
          <table:table-cell table:style-name="表格78.C3" office:value-type="string">
            <text:p text:style-name="P69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68">LR 旋轉</text:p>
          </table:table-cell>
          <table:table-cell table:style-name="表格78.B4" office:value-type="string">
            <text:p text:style-name="P69">新節點在左子樹的右邊</text:p>
          </table:table-cell>
          <table:table-cell table:style-name="表格78.C4" office:value-type="string">
            <text:p text:style-name="P69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68">RL 旋轉</text:p>
          </table:table-cell>
          <table:table-cell table:style-name="表格78.B5" office:value-type="string">
            <text:p text:style-name="P69">新節點在右子樹的左邊</text:p>
          </table:table-cell>
          <table:table-cell table:style-name="表格78.C5" office:value-type="string">
            <text:p text:style-name="P69">先右旋再左旋（兩次）</text:p>
          </table:table-cell>
        </table:table-row>
      </table:table>
      <text:p text:style-name="P51"/>
      <text:p text:style-name="P71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7">規則比 AVL Tree 寬鬆，不要求嚴格平衡，旋轉次數更少</text:p>
            <text:p text:style-name="P97">平均效能比 AVL Tree 更穩定，適合頻繁插入刪除的場景</text:p>
            <text:p text:style-name="P54"/>
            <text:p text:style-name="P97">實際應用：</text:p>
            <text:p text:style-name="P97"><text:s text:c="2"/>✔ C++ STL 的 std::map、std::set</text:p>
            <text:p text:style-name="P97"><text:s text:c="2"/>✔ Java 的 TreeMap、TreeSet</text:p>
            <text:p text:style-name="P97"><text:s text:c="2"/>✔ Linux 核心的行程排程器</text:p>
          </table:table-cell>
        </table:table-row>
      </table:table>
      <text:p text:style-name="P51"><text:soft-page-break/></text:p>
      <text:p text:style-name="P71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73">每個節點可以有很多 key（不只 2 個）</text:p>
            <text:p text:style-name="P73">專為磁碟讀取最佳化：一次讀一個節點 = 一次磁碟 I/O</text:p>
            <text:p text:style-name="P54"/>
            <text:p text:style-name="P73">實際應用：</text:p>
            <text:p text:style-name="P73"><text:s text:c="2"/>✔ MySQL、PostgreSQL 的索引（Index）</text:p>
            <text:p text:style-name="P73"><text:s text:c="2"/>✔ 檔案系統（NTFS、ext4）</text:p>
          </table:table-cell>
        </table:table-row>
      </table:table>
      <text:p text:style-name="P51"/>
      <text:p text:style-name="P71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50"/>
          </table:table-cell>
          <table:table-cell table:style-name="表格81.A1" office:value-type="string">
            <text:p text:style-name="P82">AVL Tree</text:p>
          </table:table-cell>
          <table:table-cell table:style-name="表格81.A1" office:value-type="string">
            <text:p text:style-name="P82">Red-Black Tree</text:p>
          </table:table-cell>
          <table:table-cell table:style-name="表格81.A1" office:value-type="string">
            <text:p text:style-name="P82">B-Tree</text:p>
          </table:table-cell>
        </table:table-row>
        <table:table-row table:style-name="表格81.1">
          <table:table-cell table:style-name="表格81.A2" office:value-type="string">
            <text:p text:style-name="P82">嚴格程度</text:p>
          </table:table-cell>
          <table:table-cell table:style-name="表格81.B2" office:value-type="string">
            <text:p text:style-name="P69">最嚴格</text:p>
          </table:table-cell>
          <table:table-cell table:style-name="表格81.C2" office:value-type="string">
            <text:p text:style-name="P69">較寬鬆</text:p>
          </table:table-cell>
          <table:table-cell table:style-name="表格81.D2" office:value-type="string">
            <text:p text:style-name="P69">依階數</text:p>
          </table:table-cell>
        </table:table-row>
        <table:table-row table:style-name="表格81.1">
          <table:table-cell table:style-name="表格81.A2" office:value-type="string">
            <text:p text:style-name="P82">搜尋速度</text:p>
          </table:table-cell>
          <table:table-cell table:style-name="表格81.B3" office:value-type="string">
            <text:p text:style-name="P69">最快</text:p>
          </table:table-cell>
          <table:table-cell table:style-name="表格81.C3" office:value-type="string">
            <text:p text:style-name="P69">略慢</text:p>
          </table:table-cell>
          <table:table-cell table:style-name="表格81.D3" office:value-type="string">
            <text:p text:style-name="P69">磁碟最優</text:p>
          </table:table-cell>
        </table:table-row>
        <table:table-row table:style-name="表格81.1">
          <table:table-cell table:style-name="表格81.A2" office:value-type="string">
            <text:p text:style-name="P82">插入刪除</text:p>
          </table:table-cell>
          <table:table-cell table:style-name="表格81.B4" office:value-type="string">
            <text:p text:style-name="P69">較慢（旋轉多）</text:p>
          </table:table-cell>
          <table:table-cell table:style-name="表格81.C4" office:value-type="string">
            <text:p text:style-name="P69">較快</text:p>
          </table:table-cell>
          <table:table-cell table:style-name="表格81.D4" office:value-type="string">
            <text:p text:style-name="P69">磁碟最優</text:p>
          </table:table-cell>
        </table:table-row>
        <table:table-row table:style-name="表格81.1">
          <table:table-cell table:style-name="表格81.A2" office:value-type="string">
            <text:p text:style-name="P82">主要用途</text:p>
          </table:table-cell>
          <table:table-cell table:style-name="表格81.B5" office:value-type="string">
            <text:p text:style-name="P69">記憶體搜尋</text:p>
          </table:table-cell>
          <table:table-cell table:style-name="表格81.C5" office:value-type="string">
            <text:p text:style-name="P69">STL / Java</text:p>
          </table:table-cell>
          <table:table-cell table:style-name="表格81.D5" office:value-type="string">
            <text:p text:style-name="P69">資料庫索引</text:p>
          </table:table-cell>
        </table:table-row>
      </table:table>
      <text:p text:style-name="P51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0">🎯 一句話記住核心：</text:p>
            <text:p text:style-name="P90">BST 不保證平衡，插入順序決定形狀；</text:p>
            <text:p text:style-name="P90">要保證 O(log n) 就必須用 AVL Tree 或 Red-Black Tree。</text:p>
          </table:table-cell>
        </table:table-row>
      </table:table>
      <text:p text:style-name="P49"/>
      <text:p text:style-name="P49"/>
      <text:h text:style-name="P63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79">先搞清楚：AVL Tree 和 Red-Black Tree 是二元樹（每節點最多 2 個小孩）</text:p>
            <text:p text:style-name="P79">但 B-Tree 不是二元樹！每個節點可以有很多小孩，是「多元樹（M-ary Tree）」</text:p>
          </table:table-cell>
        </table:table-row>
      </table:table>
      <text:p text:style-name="P46"/>
      <text:p text:style-name="P47"/>
      <text:h text:style-name="P64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74">AVL Tree = 自動保持平衡的 BST（Binary Search Tree）</text:p>
            <text:p text:style-name="P74">✔ 是二元樹（每節點最多 2 個 child）</text:p>
            <text:p text:style-name="P74">✔ 同時也是 BST（左 &lt; 根 &lt; 右）</text:p>
            <text:p text:style-name="P74">✔ 額外保證：任何節點的「平衡因子」絕對值 ≤ 1</text:p>
          </table:table-cell>
        </table:table-row>
      </table:table>
      <text:p text:style-name="P46"/>
      <text:h text:style-name="P63" text:outline-level="2">AVL-1　平衡因子（Balance Factor）</text:h>
      <text:p text:style-name="P70">每個節點都有一個平衡因子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86">平衡因子（BF）= 左子樹高度 − 右子樹高度</text:p>
            <text:p text:style-name="P45"/>
            <text:p text:style-name="P86">BF = <text:s/>0 <text:s/>→ 左右一樣高，完全平衡</text:p>
            <text:p text:style-name="P86">BF = <text:s/>1 <text:s/>→ 左邊比右邊高 1，仍然合法</text:p>
            <text:p text:style-name="P86">BF = -1 <text:s/>→ 右邊比左邊高 1，仍然合法</text:p>
            <text:p text:style-name="P86">BF ≥ 2 或 ≤ -2 <text:s/>→ 失衡！必須旋轉修復</text:p>
          </table:table-cell>
        </table:table-row>
      </table:table>
      <text:p text:style-name="P46"/>
      <text:p text:style-name="P70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81"><text:s text:c="8"/>30 (BF=1) <text:s text:c="9"/>← 左高度2，右高度1，差=1 合法</text:p>
            <text:p text:style-name="P81"><text:s text:c="7"/>/ <text:s/>\</text:p>
            <text:p text:style-name="P81"><text:s text:c="4"/>20(1) <text:s/>40(0) <text:s text:c="10"/>← BF 都在 -1~1 之間</text:p>
            <text:p text:style-name="P81"><text:s text:c="3"/>/</text:p>
            <text:p text:style-name="P81"><text:s text:c="2"/>10(0)</text:p>
          </table:table-cell>
        </table:table-row>
      </table:table>
      <text:p text:style-name="P46"/>
      <text:h text:style-name="P63" text:outline-level="2">AVL-2　四種旋轉（超重要，考試必考）</text:h>
      <text:p text:style-name="P70">只要插入或刪除後有節點的 BF 超出範圍，就立刻旋轉修復。共有 4 種情況：</text:p>
      <text:p text:style-name="P46"/>
      <text:p text:style-name="P72">旋轉一：LL 旋轉（新節點插入在失衡節點左子樹的左邊）</text:p>
      <text:p text:style-name="P70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96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81"><text:s text:c="4"/>30 (BF=2) ← 失衡！</text:p>
                  <text:p text:style-name="P81"><text:s text:c="3"/>/</text:p>
                  <text:p text:style-name="P81"><text:s text:c="2"/>20 (BF=1)</text:p>
                  <text:p text:style-name="P81"><text:s/>/</text:p>
                  <text:p text:style-name="P81">10 <text:s text:c="11"/>← 新插入節點</text:p>
                </table:table-cell>
              </table:table-row>
            </table:table>
            <text:p text:style-name="P47"/>
          </table:table-cell>
          <table:table-cell table:style-name="表格87.B1" office:value-type="string">
            <text:p text:style-name="P89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81"><text:s text:c="4"/>20 (BF=0)</text:p>
                  <text:p text:style-name="P81"><text:s text:c="3"/>/ <text:s/>\</text:p>
                  <text:p text:style-name="P81"><text:s text:c="2"/>10 <text:s text:c="2"/>30</text:p>
                  <text:p text:style-name="P48"/>
                  <text:p text:style-name="P81">20 變成新的根，</text:p>
                  <text:p text:style-name="P81">30 變成 20 的右子</text:p>
                </table:table-cell>
              </table:table-row>
            </table:table>
            <text:p text:style-name="P47"/>
          </table:table-cell>
        </table:table-row>
      </table:table>
      <text:p text:style-name="P46"/>
      <text:p text:style-name="P72">旋轉二：RR 旋轉（新節點插入在失衡節點右子樹的右邊）</text:p>
      <text:p text:style-name="P70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96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81"><text:s text:c="2"/>10 (BF=-2) ← 失衡！</text:p>
                  <text:p text:style-name="P81"><text:s text:c="4"/>\</text:p>
                  <text:p text:style-name="P81"><text:s text:c="4"/>20 (BF=-1)</text:p>
                  <text:p text:style-name="P81"><text:s text:c="6"/>\</text:p>
                  <text:p text:style-name="P81"><text:s text:c="6"/>30 <text:s text:c="4"/>← 新插入節點</text:p>
                </table:table-cell>
              </table:table-row>
            </table:table>
            <text:p text:style-name="P47"/>
          </table:table-cell>
          <table:table-cell table:style-name="表格90.B1" office:value-type="string">
            <text:p text:style-name="P89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81"><text:s text:c="4"/>20 (BF=0)</text:p>
                  <text:p text:style-name="P81"><text:s text:c="3"/>/ <text:s/>\</text:p>
                  <text:p text:style-name="P81"><text:s text:c="2"/>10 <text:s text:c="2"/>30</text:p>
                  <text:p text:style-name="P48"/>
                  <text:p text:style-name="P81">20 變成新的根，</text:p>
                  <text:p text:style-name="P81">10 變成 20 的左子</text:p>
                </table:table-cell>
              </table:table-row>
            </table:table>
            <text:p text:style-name="P47"/>
          </table:table-cell>
        </table:table-row>
      </table:table>
      <text:p text:style-name="P46"/>
      <text:p text:style-name="P72">旋轉三：LR 旋轉（新節點插入在失衡節點左子樹的右邊）</text:p>
      <text:p text:style-name="P70">解法：先對左子節點做左旋，再對失衡節點做右旋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81">插入前（失衡）： <text:s text:c="9"/>第一步：左旋 20： <text:s text:c="5"/>第二步：右旋 30：</text:p>
            <text:p text:style-name="P81"><text:s text:c="4"/>30 (BF=2) <text:s text:c="16"/>30 (BF=2) <text:s text:c="13"/>25 (BF=0)</text:p>
            <text:p text:style-name="P81"><text:s text:c="3"/>/ <text:s text:c="24"/>/ <text:s text:c="21"/>/ <text:s/>\</text:p>
            <text:p text:style-name="P81"><text:s text:c="2"/>20 (BF=-1) <text:s text:c="14"/>25 (BF=1) <text:s text:c="11"/>20 <text:s text:c="4"/>30</text:p>
            <text:p text:style-name="P81"><text:s text:c="4"/>\ <text:s text:c="21"/>/</text:p>
            <text:p text:style-name="P81"><text:s text:c="4"/>25 <text:s/>← 新節點 <text:s text:c="8"/>20</text:p>
          </table:table-cell>
        </table:table-row>
      </table:table>
      <text:p text:style-name="P46"/>
      <text:p text:style-name="P72">旋轉四：RL 旋轉（新節點插入在失衡節點右子樹的左邊）</text:p>
      <text:p text:style-name="P70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81">插入前（失衡）： <text:s text:c="9"/>第一步：右旋 40： <text:s text:c="5"/>第二步：左旋 20：</text:p>
            <text:p text:style-name="P81"><text:s text:c="2"/>20 (BF=-2) <text:s text:c="15"/>20 (BF=-2) <text:s text:c="13"/>25 (BF=0)</text:p>
            <text:p text:style-name="P81"><text:s text:c="4"/>\ <text:s text:c="24"/>\ <text:s text:c="19"/>/ <text:s/>\</text:p>
            <text:p text:style-name="P81"><text:s text:c="4"/>40 (BF=1) <text:s text:c="16"/>25 (BF=-1) <text:s text:c="8"/>20 <text:s text:c="4"/>40</text:p>
            <text:p text:style-name="P81"><text:s text:c="3"/>/ <text:s text:c="27"/>\</text:p>
            <text:p text:style-name="P81"><text:s text:c="2"/>25 <text:s/>← 新節點 <text:s text:c="18"/>40</text:p>
          </table:table-cell>
        </table:table-row>
      </table:table>
      <text:p text:style-name="P46"/>
      <text:h text:style-name="P63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83">旋轉類型</text:p>
          </table:table-cell>
          <table:table-cell table:style-name="表格95.A1" office:value-type="string">
            <text:p text:style-name="P83">BF失衡情況</text:p>
          </table:table-cell>
          <table:table-cell table:style-name="表格95.A1" office:value-type="string">
            <text:p text:style-name="P83">新節點位置</text:p>
          </table:table-cell>
          <table:table-cell table:style-name="表格95.A1" office:value-type="string">
            <text:p text:style-name="P83">旋轉方式</text:p>
          </table:table-cell>
        </table:table-row>
        <table:table-row table:style-name="表格95.1">
          <table:table-cell table:style-name="表格95.A2" office:value-type="string">
            <text:p text:style-name="P75">LL 旋轉</text:p>
          </table:table-cell>
          <table:table-cell table:style-name="表格95.B2" office:value-type="string">
            <text:p text:style-name="P70">BF ≥ 2（左重）</text:p>
          </table:table-cell>
          <table:table-cell table:style-name="表格95.C2" office:value-type="string">
            <text:p text:style-name="P70">左子樹的左邊</text:p>
          </table:table-cell>
          <table:table-cell table:style-name="表格95.D2" office:value-type="string">
            <text:p text:style-name="P70">右旋一次</text:p>
          </table:table-cell>
        </table:table-row>
        <table:table-row table:style-name="表格95.1">
          <table:table-cell table:style-name="表格95.A3" office:value-type="string">
            <text:p text:style-name="P75">RR 旋轉</text:p>
          </table:table-cell>
          <table:table-cell table:style-name="表格95.B3" office:value-type="string">
            <text:p text:style-name="P70">BF ≤ -2（右重）</text:p>
          </table:table-cell>
          <table:table-cell table:style-name="表格95.C3" office:value-type="string">
            <text:p text:style-name="P70">右子樹的右邊</text:p>
          </table:table-cell>
          <table:table-cell table:style-name="表格95.D3" office:value-type="string">
            <text:p text:style-name="P70">左旋一次</text:p>
          </table:table-cell>
        </table:table-row>
        <table:table-row table:style-name="表格95.1">
          <table:table-cell table:style-name="表格95.A4" office:value-type="string">
            <text:p text:style-name="P75">LR 旋轉</text:p>
          </table:table-cell>
          <table:table-cell table:style-name="表格95.B4" office:value-type="string">
            <text:p text:style-name="P70">BF ≥ 2（左重）</text:p>
          </table:table-cell>
          <table:table-cell table:style-name="表格95.C4" office:value-type="string">
            <text:p text:style-name="P70">左子樹的右邊</text:p>
          </table:table-cell>
          <table:table-cell table:style-name="表格95.D4" office:value-type="string">
            <text:p text:style-name="P70">先左旋再右旋</text:p>
          </table:table-cell>
        </table:table-row>
        <table:table-row table:style-name="表格95.1">
          <table:table-cell table:style-name="表格95.A5" office:value-type="string">
            <text:p text:style-name="P75">RL 旋轉</text:p>
          </table:table-cell>
          <table:table-cell table:style-name="表格95.B5" office:value-type="string">
            <text:p text:style-name="P70">BF ≤ -2（右重）</text:p>
          </table:table-cell>
          <table:table-cell table:style-name="表格95.C5" office:value-type="string">
            <text:p text:style-name="P70">右子樹的左邊</text:p>
          </table:table-cell>
          <table:table-cell table:style-name="表格95.D5" office:value-type="string">
            <text:p text:style-name="P70">先右旋再左旋</text:p>
          </table:table-cell>
        </table:table-row>
      </table:table>
      <text:p text:style-name="P46"/>
      <text:h text:style-name="P63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91">AVL Tree 高度永遠維持在 O(log n)</text:p>
            <text:p text:style-name="P45"><text:soft-page-break/><text:span text:style-name="T5">搜尋：O(log n) <text:s text:c="2"/>插入：O(log n) <text:s text:c="2"/>刪除：O(log n)</text:span></text:p>
            <text:p text:style-name="P45"/>
            <text:p text:style-name="P91">代價：每次插入/刪除後都要「往上回頭檢查每個節點的 BF」，可能旋轉多次</text:p>
            <text:p text:style-name="P91">→ 如果需要大量插入刪除，Red-Black Tree 可能更適合</text:p>
          </table:table-cell>
        </table:table-row>
      </table:table>
      <text:p text:style-name="P47"/>
      <text:h text:style-name="P64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8">Red-Black Tree（紅黑樹）= 每個節點標記「紅色或黑色」的自平衡 BST</text:p>
            <text:p text:style-name="P98">✔ 是二元樹（每節點最多 2 個 child）</text:p>
            <text:p text:style-name="P98">✔ 同時也是 BST（左 &lt; 根 &lt; 右）</text:p>
            <text:p text:style-name="P98">✔ 用顏色規則取代嚴格的高度差限制，效能更穩定</text:p>
          </table:table-cell>
        </table:table-row>
      </table:table>
      <text:p text:style-name="P46"/>
      <text:h text:style-name="P63" text:outline-level="2">RBT-1　五條規則（缺一不可）</text:h>
      <text:p text:style-name="P70">每棵 Red-Black Tree 必須同時滿足以下五條：</text:p>
      <text:p text:style-name="P46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99">規則1</text:p>
          </table:table-cell>
          <table:table-cell table:style-name="表格98.B1" office:value-type="string">
            <text:p text:style-name="P70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99">規則2</text:p>
          </table:table-cell>
          <table:table-cell table:style-name="表格98.B2" office:value-type="string">
            <text:p text:style-name="P70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99">規則3</text:p>
          </table:table-cell>
          <table:table-cell table:style-name="表格98.B3" office:value-type="string">
            <text:p text:style-name="P70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99">規則4</text:p>
          </table:table-cell>
          <table:table-cell table:style-name="表格98.B4" office:value-type="string">
            <text:p text:style-name="P70">紅色節點的小孩一定是黑色（紅色節點不能相鄰）</text:p>
          </table:table-cell>
        </table:table-row>
        <table:table-row table:style-name="表格98.1">
          <table:table-cell table:style-name="表格98.A1" office:value-type="string">
            <text:p text:style-name="P99">規則5</text:p>
          </table:table-cell>
          <table:table-cell table:style-name="表格98.B5" office:value-type="string">
            <text:p text:style-name="P70">從任意節點到其所有葉節點的路徑，黑色節點數量相同（黑高度相同）</text:p>
          </table:table-cell>
        </table:table-row>
      </table:table>
      <text:p text:style-name="P46"/>
      <text:h text:style-name="P63" text:outline-level="2">RBT-2　視覺化說明</text:h>
      <text:p text:style-name="P70">一棵合法的 Red-Black Tree（R=紅，B=黑）：</text:p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81"><text:s text:c="13"/>B:10</text:p>
            <text:p text:style-name="P81"><text:s text:c="12"/>/ <text:s text:c="3"/>\</text:p>
            <text:p text:style-name="P81"><text:s text:c="10"/>R:5 <text:s text:c="3"/>B:20</text:p>
            <text:p text:style-name="P81"><text:s text:c="9"/>/ <text:s/>\ <text:s text:c="5"/>\</text:p>
            <text:p text:style-name="P81"><text:s text:c="7"/>B:3 <text:s/>B:7 <text:s text:c="3"/>R:30</text:p>
            <text:p text:style-name="P48"/>
            <text:p text:style-name="P81">驗證：</text:p>
            <text:p text:style-name="P81">規則2 ✔：root=10 是黑色</text:p>
            <text:p text:style-name="P81">規則4 ✔：紅色節點(5,30)的小孩都是黑色</text:p>
            <text:p text:style-name="P81">規則5 ✔：每條路徑的黑節點數都是 2（10→5→3、10→5→7、10→20→30）</text:p>
          </table:table-cell>
        </table:table-row>
      </table:table>
      <text:p text:style-name="P46"/>
      <text:h text:style-name="P63" text:outline-level="2">RBT-3　為什麼「顏色」能保持平衡？</text:h>
      <text:p text:style-name="P70">規則 4 + 規則 5 合起來保證了高度的上限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98">因為紅色節點不能連續出現（規則4），</text:p>
            <text:p text:style-name="P98">最長的路徑（紅黑交替）最多是最短路徑（全黑）的 2 倍。</text:p>
            <text:p text:style-name="P45"/>
            <text:p text:style-name="P45"><text:soft-page-break/><text:span text:style-name="T61">因此 Red-Black Tree 的高度保證在 2 × log₂(n+1) 以內</text:span></text:p>
            <text:p text:style-name="P98">→ 搜尋、插入、刪除仍然是 O(log n)</text:p>
          </table:table-cell>
        </table:table-row>
      </table:table>
      <text:p text:style-name="P46"/>
      <text:h text:style-name="P63" text:outline-level="2">RBT-4　插入後如何修復？</text:h>
      <text:p text:style-name="P70">插入新節點時，先塗成紅色，再根據違反的規則做修復：</text:p>
      <table:table table:name="表格101" table:style-name="表格101">
        <table:table-column table:style-name="表格101.A"/>
        <table:table-column table:style-name="表格101.B" table:number-columns-repeated="2"/>
        <table:table-row table:style-name="表格101.1">
          <table:table-cell table:style-name="表格101.A1" office:value-type="string">
            <text:p text:style-name="P100">情況</text:p>
          </table:table-cell>
          <table:table-cell table:style-name="表格101.A1" office:value-type="string">
            <text:p text:style-name="P100">條件</text:p>
          </table:table-cell>
          <table:table-cell table:style-name="表格101.A1" office:value-type="string">
            <text:p text:style-name="P100">操作</text:p>
          </table:table-cell>
        </table:table-row>
        <table:table-row table:style-name="表格101.1">
          <table:table-cell table:style-name="表格101.A2" office:value-type="string">
            <text:p text:style-name="P101">Case 1</text:p>
          </table:table-cell>
          <table:table-cell table:style-name="表格101.B2" office:value-type="string">
            <text:p text:style-name="P70">叔叔節點是紅色</text:p>
          </table:table-cell>
          <table:table-cell table:style-name="表格101.C2" office:value-type="string">
            <text:p text:style-name="P70">父、叔塗黑，祖父塗紅，往上繼續檢查</text:p>
          </table:table-cell>
        </table:table-row>
        <table:table-row table:style-name="表格101.1">
          <table:table-cell table:style-name="表格101.A3" office:value-type="string">
            <text:p text:style-name="P101">Case 2</text:p>
          </table:table-cell>
          <table:table-cell table:style-name="表格101.B3" office:value-type="string">
            <text:p text:style-name="P70">叔叔是黑色，自己是父的右子</text:p>
          </table:table-cell>
          <table:table-cell table:style-name="表格101.C3" office:value-type="string">
            <text:p text:style-name="P70">先旋轉轉成 Case 3</text:p>
          </table:table-cell>
        </table:table-row>
        <table:table-row table:style-name="表格101.1">
          <table:table-cell table:style-name="表格101.A4" office:value-type="string">
            <text:p text:style-name="P101">Case 3</text:p>
          </table:table-cell>
          <table:table-cell table:style-name="表格101.B4" office:value-type="string">
            <text:p text:style-name="P70">叔叔是黑色，自己是父的左子</text:p>
          </table:table-cell>
          <table:table-cell table:style-name="表格101.C4" office:value-type="string">
            <text:p text:style-name="P70">旋轉祖父，交換父祖父顏色</text:p>
          </table:table-cell>
        </table:table-row>
      </table:table>
      <text:p text:style-name="P46"/>
      <text:h text:style-name="P63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83">比較項目</text:p>
          </table:table-cell>
          <table:table-cell table:style-name="表格102.B1" office:value-type="string">
            <text:p text:style-name="P76">AVL Tree</text:p>
          </table:table-cell>
          <table:table-cell table:style-name="表格102.C1" office:value-type="string">
            <text:p text:style-name="P100">Red-Black Tree</text:p>
          </table:table-cell>
        </table:table-row>
        <table:table-row table:style-name="表格102.1">
          <table:table-cell table:style-name="表格102.A2" office:value-type="string">
            <text:p text:style-name="P83">是否為二元樹</text:p>
          </table:table-cell>
          <table:table-cell table:style-name="表格102.B2" office:value-type="string">
            <text:p text:style-name="P70">✔ 是</text:p>
          </table:table-cell>
          <table:table-cell table:style-name="表格102.C2" office:value-type="string">
            <text:p text:style-name="P70">✔ 是</text:p>
          </table:table-cell>
        </table:table-row>
        <table:table-row table:style-name="表格102.1">
          <table:table-cell table:style-name="表格102.A2" office:value-type="string">
            <text:p text:style-name="P83">是否為 BST</text:p>
          </table:table-cell>
          <table:table-cell table:style-name="表格102.B3" office:value-type="string">
            <text:p text:style-name="P70">✔ 是</text:p>
          </table:table-cell>
          <table:table-cell table:style-name="表格102.C3" office:value-type="string">
            <text:p text:style-name="P70">✔ 是</text:p>
          </table:table-cell>
        </table:table-row>
        <table:table-row table:style-name="表格102.1">
          <table:table-cell table:style-name="表格102.A2" office:value-type="string">
            <text:p text:style-name="P83">平衡機制</text:p>
          </table:table-cell>
          <table:table-cell table:style-name="表格102.B4" office:value-type="string">
            <text:p text:style-name="P70">嚴格高度差 ≤ 1</text:p>
          </table:table-cell>
          <table:table-cell table:style-name="表格102.C4" office:value-type="string">
            <text:p text:style-name="P70">顏色規則</text:p>
          </table:table-cell>
        </table:table-row>
        <table:table-row table:style-name="表格102.1">
          <table:table-cell table:style-name="表格102.A2" office:value-type="string">
            <text:p text:style-name="P83">平衡程度</text:p>
          </table:table-cell>
          <table:table-cell table:style-name="表格102.B5" office:value-type="string">
            <text:p text:style-name="P70">更嚴格（更矮）</text:p>
          </table:table-cell>
          <table:table-cell table:style-name="表格102.C5" office:value-type="string">
            <text:p text:style-name="P70">較寬鬆（可略高）</text:p>
          </table:table-cell>
        </table:table-row>
        <table:table-row table:style-name="表格102.1">
          <table:table-cell table:style-name="表格102.A2" office:value-type="string">
            <text:p text:style-name="P83">搜尋速度</text:p>
          </table:table-cell>
          <table:table-cell table:style-name="表格102.B6" office:value-type="string">
            <text:p text:style-name="P70">略快</text:p>
          </table:table-cell>
          <table:table-cell table:style-name="表格102.C6" office:value-type="string">
            <text:p text:style-name="P70">略慢</text:p>
          </table:table-cell>
        </table:table-row>
        <table:table-row table:style-name="表格102.1">
          <table:table-cell table:style-name="表格102.A2" office:value-type="string">
            <text:p text:style-name="P83">插入/刪除速度</text:p>
          </table:table-cell>
          <table:table-cell table:style-name="表格102.B7" office:value-type="string">
            <text:p text:style-name="P70">較慢（旋轉多）</text:p>
          </table:table-cell>
          <table:table-cell table:style-name="表格102.C7" office:value-type="string">
            <text:p text:style-name="P70">較快（旋轉少）</text:p>
          </table:table-cell>
        </table:table-row>
        <table:table-row table:style-name="表格102.1">
          <table:table-cell table:style-name="表格102.A2" office:value-type="string">
            <text:p text:style-name="P83">適合場景</text:p>
          </table:table-cell>
          <table:table-cell table:style-name="表格102.B8" office:value-type="string">
            <text:p text:style-name="P70">讀多寫少</text:p>
          </table:table-cell>
          <table:table-cell table:style-name="表格102.C8" office:value-type="string">
            <text:p text:style-name="P70">讀寫頻繁</text:p>
          </table:table-cell>
        </table:table-row>
        <table:table-row table:style-name="表格102.1">
          <table:table-cell table:style-name="表格102.A2" office:value-type="string">
            <text:p text:style-name="P83">實際應用</text:p>
          </table:table-cell>
          <table:table-cell table:style-name="表格102.B9" office:value-type="string">
            <text:p text:style-name="P70">少數特殊場景</text:p>
          </table:table-cell>
          <table:table-cell table:style-name="表格102.C9" office:value-type="string">
            <text:p text:style-name="P70">C++ map、Java TreeMap、Linux 排程</text:p>
          </table:table-cell>
        </table:table-row>
      </table:table>
      <text:p text:style-name="P47"/>
      <text:h text:style-name="P64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79">⚠️ B-Tree 不是二元樹！</text:p>
            <text:p text:style-name="P79">Binary Tree = 每個節點最多 2 個子節點</text:p>
            <text:p text:style-name="P79">B-Tree = 每個節點可以有很多個 key 和很多個子節點（階數決定上限）</text:p>
            <text:p text:style-name="P79">B-Tree 是「多元搜尋樹（M-ary Search Tree）」</text:p>
          </table:table-cell>
        </table:table-row>
      </table:table>
      <text:p text:style-name="P46"/>
      <text:h text:style-name="P63" text:outline-level="2">BT-1　為什麼要發明 B-Tree？</text:h>
      <text:p text:style-name="P70">回憶 BST 和 AVL Tree 的問題：它們都假設資料在記憶體（RAM）裡。</text:p>
      <text:p text:style-name="P70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79">RAM <text:s/>讀取速度：奈秒（ns）級，約 100 ns</text:p>
            <text:p text:style-name="P79">磁碟 讀取速度：毫秒（ms）級，約 5~10 ms</text:p>
            <text:p text:style-name="P45"/>
            <text:p text:style-name="P79">磁碟比 RAM 慢約 100,000 倍！</text:p>
            <text:p text:style-name="P45"/>
            <text:p text:style-name="P79">BST 有 100 萬筆資料 → 需要 log₂(1,000,000) ≈ 20 次磁碟讀取</text:p>
            <text:p text:style-name="P79">B-Tree（階數500）→ 只需 log₅₀₀(1,000,000) ≈ 4 次磁碟讀取</text:p>
            <text:p text:style-name="P79">→ B-Tree 讓磁碟讀取次數從 20 降到 4，快了 5 倍！</text:p>
          </table:table-cell>
        </table:table-row>
      </table:table>
      <text:p text:style-name="P46"/>
      <text:h text:style-name="P63" text:outline-level="2">BT-2　B-Tree 的結構</text:h>
      <text:p text:style-name="P70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86">B-Tree 的「階數（Order）m」定義了節點的上限：</text:p>
            <text:p text:style-name="P86"><text:s text:c="2"/>每個節點最多 m 個子節點，最多 m-1 個 key</text:p>
            <text:p text:style-name="P86"><text:s text:c="2"/>每個非 root 節點最少 ⌈m/2⌉ 個子節點</text:p>
          </table:table-cell>
        </table:table-row>
      </table:table>
      <text:p text:style-name="P46"/>
      <text:p text:style-name="P70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81"><text:s text:c="17"/>[20 | 50] <text:s text:c="15"/>← root，有 2 個 key</text:p>
            <text:p text:style-name="P81"><text:s text:c="16"/>/ <text:s text:c="3"/>| <text:s text:c="3"/>\</text:p>
            <text:p text:style-name="P81"><text:s text:c="11"/>[10] <text:s text:c="2"/>[30|40] <text:s text:c="2"/>[60|70|80]</text:p>
            <text:p text:style-name="P81"><text:s text:c="11"/>↑ <text:s text:c="8"/>↑ <text:s text:c="10"/>↑</text:p>
            <text:p text:style-name="P81"><text:s text:c="9"/>子節點1 <text:s/>子節點2 <text:s text:c="4"/>子節點3</text:p>
            <text:p text:style-name="P48"/>
            <text:p text:style-name="P81">規則（同 BST 概念，但擴展到多個 key）：</text:p>
            <text:p text:style-name="P81"><text:s text:c="2"/>子節點1 的值 &lt; 20</text:p>
            <text:p text:style-name="P81"><text:s text:c="2"/>20 &lt; 子節點2 的值 &lt; 50</text:p>
            <text:p text:style-name="P81"><text:s text:c="2"/>子節點3 的值 &gt; 50</text:p>
          </table:table-cell>
        </table:table-row>
      </table:table>
      <text:p text:style-name="P46"/>
      <text:h text:style-name="P43" text:outline-level="2"><text:soft-page-break/><text:span text:style-name="T3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76">性質</text:p>
          </table:table-cell>
          <table:table-cell table:style-name="表格107.A1" office:value-type="string">
            <text:p text:style-name="P76">說明</text:p>
          </table:table-cell>
        </table:table-row>
        <table:table-row table:style-name="表格107.1">
          <table:table-cell table:style-name="表格107.A2" office:value-type="string">
            <text:p text:style-name="P76">所有葉節點在同一層</text:p>
          </table:table-cell>
          <table:table-cell table:style-name="表格107.B2" office:value-type="string">
            <text:p text:style-name="P70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76">每次搜尋保證 O(log n)</text:p>
          </table:table-cell>
          <table:table-cell table:style-name="表格107.B3" office:value-type="string">
            <text:p text:style-name="P70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76">節點飽滿時自動分裂</text:p>
          </table:table-cell>
          <table:table-cell table:style-name="表格107.B4" office:value-type="string">
            <text:p text:style-name="P70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76">自動合併</text:p>
          </table:table-cell>
          <table:table-cell table:style-name="表格107.B5" office:value-type="string">
            <text:p text:style-name="P70">刪除後若節點太少，與兄弟合併或借 key</text:p>
          </table:table-cell>
        </table:table-row>
      </table:table>
      <text:p text:style-name="P46"/>
      <text:h text:style-name="P63" text:outline-level="2">BT-4　B+Tree（資料庫最常用）</text:h>
      <text:p text:style-name="P70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84">B-Tree</text:p>
            <text:list text:style-name="WWNum2">
              <text:list-item text:start-value="1">
                <text:p text:style-name="P65">所有節點都存 key 和 data</text:p>
              </text:list-item>
              <text:list-item>
                <text:p text:style-name="P65">搜尋可能在中間節點就結束</text:p>
              </text:list-item>
              <text:list-item>
                <text:p text:style-name="P65">範圍查詢效率較低</text:p>
              </text:list-item>
            </text:list>
          </table:table-cell>
          <table:table-cell table:style-name="表格108.B1" office:value-type="string">
            <text:p text:style-name="P84">B+Tree</text:p>
            <text:list text:continue-numbering="true" text:style-name="WWNum2">
              <text:list-item>
                <text:p text:style-name="P65">內部節點只存 key，data 只放葉節點</text:p>
              </text:list-item>
              <text:list-item>
                <text:p text:style-name="P65">搜尋一定走到葉節點才結束</text:p>
              </text:list-item>
              <text:list-item>
                <text:p text:style-name="P65">所有葉節點串成一條 Linked List，範圍查詢超快</text:p>
              </text:list-item>
            </text:list>
          </table:table-cell>
        </table:table-row>
      </table:table>
      <text:p text:style-name="P46"/>
      <text:p text:style-name="P70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81"><text:s text:c="2"/>... ← [10|data] ↔ [20|data] ↔ [30|data] ↔ [40|data] → ...</text:p>
            <text:p text:style-name="P81"><text:s text:c="10"/>↑ 所有葉節點左右串聯，SELECT * WHERE key BETWEEN 20 AND 40</text:p>
            <text:p text:style-name="P81"><text:s text:c="12"/>只需找到 20，然後沿著鏈結直接讀到 40，不需再搜尋！</text:p>
          </table:table-cell>
        </table:table-row>
      </table:table>
      <text:p text:style-name="P46"/>
      <text:h text:style-name="P63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76">應用場景</text:p>
          </table:table-cell>
          <table:table-cell table:style-name="表格110.A1" office:value-type="string">
            <text:p text:style-name="P76">使用的樹</text:p>
          </table:table-cell>
          <table:table-cell table:style-name="表格110.A1" office:value-type="string">
            <text:p text:style-name="P76">原因</text:p>
          </table:table-cell>
        </table:table-row>
        <table:table-row table:style-name="表格110.1">
          <table:table-cell table:style-name="表格110.A2" office:value-type="string">
            <text:p text:style-name="P76">MySQL InnoDB</text:p>
          </table:table-cell>
          <table:table-cell table:style-name="表格110.B2" office:value-type="string">
            <text:p text:style-name="P70">B+Tree</text:p>
          </table:table-cell>
          <table:table-cell table:style-name="表格110.C2" office:value-type="string">
            <text:p text:style-name="P70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76">PostgreSQL</text:p>
          </table:table-cell>
          <table:table-cell table:style-name="表格110.B3" office:value-type="string">
            <text:p text:style-name="P70">B+Tree</text:p>
          </table:table-cell>
          <table:table-cell table:style-name="表格110.C3" office:value-type="string">
            <text:p text:style-name="P70">主索引標準結構</text:p>
          </table:table-cell>
        </table:table-row>
        <table:table-row table:style-name="表格110.1">
          <table:table-cell table:style-name="表格110.A4" office:value-type="string">
            <text:p text:style-name="P76">SQLite</text:p>
          </table:table-cell>
          <table:table-cell table:style-name="表格110.B4" office:value-type="string">
            <text:p text:style-name="P70">B+Tree</text:p>
          </table:table-cell>
          <table:table-cell table:style-name="表格110.C4" office:value-type="string">
            <text:p text:style-name="P70">嵌入式資料庫標準</text:p>
          </table:table-cell>
        </table:table-row>
        <table:table-row table:style-name="表格110.1">
          <table:table-cell table:style-name="表格110.A5" office:value-type="string">
            <text:p text:style-name="P76">NTFS 檔案系統</text:p>
          </table:table-cell>
          <table:table-cell table:style-name="表格110.B5" office:value-type="string">
            <text:p text:style-name="P70">B+Tree</text:p>
          </table:table-cell>
          <table:table-cell table:style-name="表格110.C5" office:value-type="string">
            <text:p text:style-name="P70">目錄樹搜尋</text:p>
          </table:table-cell>
        </table:table-row>
        <table:table-row table:style-name="表格110.1">
          <table:table-cell table:style-name="表格110.A6" office:value-type="string">
            <text:p text:style-name="P76">ext4 檔案系統</text:p>
          </table:table-cell>
          <table:table-cell table:style-name="表格110.B6" office:value-type="string">
            <text:p text:style-name="P70">HTree（B-Tree衍生）</text:p>
          </table:table-cell>
          <table:table-cell table:style-name="表格110.C6" office:value-type="string">
            <text:p text:style-name="P70">大目錄索引</text:p>
          </table:table-cell>
        </table:table-row>
      </table:table>
      <text:p text:style-name="P46"/>
      <text:h text:style-name="P43" text:outline-level="2"><text:soft-page-break/><text:span text:style-name="T3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83">比較項目</text:p>
          </table:table-cell>
          <table:table-cell table:style-name="表格111.B1" office:value-type="string">
            <text:p text:style-name="P76">AVL Tree</text:p>
          </table:table-cell>
          <table:table-cell table:style-name="表格111.C1" office:value-type="string">
            <text:p text:style-name="P100">Red-Black Tree</text:p>
          </table:table-cell>
          <table:table-cell table:style-name="表格111.B1" office:value-type="string">
            <text:p text:style-name="P76">B-Tree / B+Tree</text:p>
          </table:table-cell>
        </table:table-row>
        <table:table-row table:style-name="表格111.1">
          <table:table-cell table:style-name="表格111.A2" office:value-type="string">
            <text:p text:style-name="P83">是否為二元樹</text:p>
          </table:table-cell>
          <table:table-cell table:style-name="表格111.B2" office:value-type="string">
            <text:p text:style-name="P70">✔ 是</text:p>
          </table:table-cell>
          <table:table-cell table:style-name="表格111.C2" office:value-type="string">
            <text:p text:style-name="P70">✔ 是</text:p>
          </table:table-cell>
          <table:table-cell table:style-name="表格111.D2" office:value-type="string">
            <text:p text:style-name="P70">✘ 否（多元樹）</text:p>
          </table:table-cell>
        </table:table-row>
        <table:table-row table:style-name="表格111.1">
          <table:table-cell table:style-name="表格111.A2" office:value-type="string">
            <text:p text:style-name="P83">是否為 BST</text:p>
          </table:table-cell>
          <table:table-cell table:style-name="表格111.B3" office:value-type="string">
            <text:p text:style-name="P70">✔ 是</text:p>
          </table:table-cell>
          <table:table-cell table:style-name="表格111.C3" office:value-type="string">
            <text:p text:style-name="P70">✔ 是</text:p>
          </table:table-cell>
          <table:table-cell table:style-name="表格111.D3" office:value-type="string">
            <text:p text:style-name="P70">✔ 類似（多 key）</text:p>
          </table:table-cell>
        </table:table-row>
        <table:table-row table:style-name="表格111.1">
          <table:table-cell table:style-name="表格111.A2" office:value-type="string">
            <text:p text:style-name="P83">每節點子節點數</text:p>
          </table:table-cell>
          <table:table-cell table:style-name="表格111.B4" office:value-type="string">
            <text:p text:style-name="P70">最多 2</text:p>
          </table:table-cell>
          <table:table-cell table:style-name="表格111.C4" office:value-type="string">
            <text:p text:style-name="P70">最多 2</text:p>
          </table:table-cell>
          <table:table-cell table:style-name="表格111.D4" office:value-type="string">
            <text:p text:style-name="P70">最多 m（階數）</text:p>
          </table:table-cell>
        </table:table-row>
        <table:table-row table:style-name="表格111.1">
          <table:table-cell table:style-name="表格111.A2" office:value-type="string">
            <text:p text:style-name="P83">平衡方式</text:p>
          </table:table-cell>
          <table:table-cell table:style-name="表格111.B5" office:value-type="string">
            <text:p text:style-name="P70">BF ≤ 1（旋轉）</text:p>
          </table:table-cell>
          <table:table-cell table:style-name="表格111.C5" office:value-type="string">
            <text:p text:style-name="P70">顏色規則（旋轉）</text:p>
          </table:table-cell>
          <table:table-cell table:style-name="表格111.D5" office:value-type="string">
            <text:p text:style-name="P70">節點分裂/合併</text:p>
          </table:table-cell>
        </table:table-row>
        <table:table-row table:style-name="表格111.1">
          <table:table-cell table:style-name="表格111.A2" office:value-type="string">
            <text:p text:style-name="P83">高度</text:p>
          </table:table-cell>
          <table:table-cell table:style-name="表格111.B6" office:value-type="string">
            <text:p text:style-name="P70">最矮</text:p>
          </table:table-cell>
          <table:table-cell table:style-name="表格111.C6" office:value-type="string">
            <text:p text:style-name="P70">略高</text:p>
          </table:table-cell>
          <table:table-cell table:style-name="表格111.D6" office:value-type="string">
            <text:p text:style-name="P70">很矮（底數大）</text:p>
          </table:table-cell>
        </table:table-row>
        <table:table-row table:style-name="表格111.1">
          <table:table-cell table:style-name="表格111.A2" office:value-type="string">
            <text:p text:style-name="P83">搜尋</text:p>
          </table:table-cell>
          <table:table-cell table:style-name="表格111.B7" office:value-type="string">
            <text:p text:style-name="P70">O(log n)</text:p>
          </table:table-cell>
          <table:table-cell table:style-name="表格111.C7" office:value-type="string">
            <text:p text:style-name="P70">O(log n)</text:p>
          </table:table-cell>
          <table:table-cell table:style-name="表格111.D7" office:value-type="string">
            <text:p text:style-name="P70">O(log n)，I/O少</text:p>
          </table:table-cell>
        </table:table-row>
        <table:table-row table:style-name="表格111.1">
          <table:table-cell table:style-name="表格111.A2" office:value-type="string">
            <text:p text:style-name="P83">插入/刪除</text:p>
          </table:table-cell>
          <table:table-cell table:style-name="表格111.B8" office:value-type="string">
            <text:p text:style-name="P70">O(log n)，旋轉多</text:p>
          </table:table-cell>
          <table:table-cell table:style-name="表格111.C8" office:value-type="string">
            <text:p text:style-name="P70">O(log n)，旋轉少</text:p>
          </table:table-cell>
          <table:table-cell table:style-name="表格111.D8" office:value-type="string">
            <text:p text:style-name="P70">O(log n)，分裂/合併</text:p>
          </table:table-cell>
        </table:table-row>
        <table:table-row table:style-name="表格111.1">
          <table:table-cell table:style-name="表格111.A2" office:value-type="string">
            <text:p text:style-name="P83">存放位置</text:p>
          </table:table-cell>
          <table:table-cell table:style-name="表格111.B9" office:value-type="string">
            <text:p text:style-name="P70">記憶體</text:p>
          </table:table-cell>
          <table:table-cell table:style-name="表格111.C9" office:value-type="string">
            <text:p text:style-name="P70">記憶體</text:p>
          </table:table-cell>
          <table:table-cell table:style-name="表格111.D9" office:value-type="string">
            <text:p text:style-name="P70">磁碟（資料庫）</text:p>
          </table:table-cell>
        </table:table-row>
        <table:table-row table:style-name="表格111.1">
          <table:table-cell table:style-name="表格111.A2" office:value-type="string">
            <text:p text:style-name="P83">主要應用</text:p>
          </table:table-cell>
          <table:table-cell table:style-name="表格111.B10" office:value-type="string">
            <text:p text:style-name="P70">特殊記憶體搜尋</text:p>
          </table:table-cell>
          <table:table-cell table:style-name="表格111.C10" office:value-type="string">
            <text:p text:style-name="P70">C++ map / Java / Linux</text:p>
          </table:table-cell>
          <table:table-cell table:style-name="表格111.D10" office:value-type="string">
            <text:p text:style-name="P70">資料庫索引、檔案系統</text:p>
          </table:table-cell>
        </table:table-row>
      </table:table>
      <text:p text:style-name="P46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1">🎯 核心記憶口訣：</text:p>
            <text:p text:style-name="P91">AVL Tree = 二元樹 + 嚴格平衡（BF ≤ 1）→ 讀多寫少場景</text:p>
            <text:p text:style-name="P91">Red-Black Tree = 二元樹 + 顏色規則 → 讀寫平衡場景（最常用）</text:p>
            <text:p text:style-name="P91">B-Tree = 多元樹 + 磁碟優化 → 資料庫/檔案系統（不是二元樹！）</text:p>
          </table:table-cell>
        </table:table-row>
      </table:table>
      <text:p text:style-name="P44"/>
      <text:h text:style-name="P9" text:outline-level="1">第四章：樹的走訪（Traversal）</text:h>
      <text:p text:style-name="P25">走訪 = 「按照某種順序，把樹上每個節點拜訪一次」。共有四種主要方法。</text:p>
      <text:p text:style-name="P8"/>
      <text:h text:style-name="P2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7"><text:s text:c="9"/>A</text:p>
            <text:p text:style-name="P17"><text:s text:c="8"/>/ \</text:p>
            <text:p text:style-name="P17"><text:s text:c="7"/>B <text:s text:c="2"/>C</text:p>
            <text:p text:style-name="P17"><text:s text:c="6"/>/ \</text:p>
            <text:p text:style-name="P17"><text:s text:c="5"/>D <text:s text:c="2"/>E</text:p>
          </table:table-cell>
        </table:table-row>
      </table:table>
      <text:p text:style-name="P8"/>
      <text:h text:style-name="P2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">DFS = Depth First Search = 一路鑽到底，再回頭</text:p>
          </table:table-cell>
        </table:table-row>
      </table:table>
      <text:p text:style-name="P8"/>
      <text:p text:style-name="P39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7">步驟：A → B → D → （D沒子節點，回） → E → （回到B完成） → C</text:p>
            <text:p text:style-name="P17">結果：A <text:s/>B <text:s/>D <text:s/>E <text:s/>C</text:p>
            <text:p text:style-name="P8"/>
            <text:p text:style-name="P17">口訣：「先吃主食（根），再吃左菜，最後右菜」</text:p>
          </table:table-cell>
        </table:table-row>
      </table:table>
      <text:p text:style-name="P39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7">步驟：D → B → E → A → C</text:p>
            <text:p text:style-name="P17">結果：D <text:s/>B <text:s/>E <text:s/>A <text:s/>C</text:p>
            <text:p text:style-name="P8"/>
            <text:p text:style-name="P17">口訣：「先左邊的人說話，主人（根）再說，最後右邊說」</text:p>
            <text:p text:style-name="P17">特性：BST 的 Inorder 結果 = 遞增排序！</text:p>
          </table:table-cell>
        </table:table-row>
      </table:table>
      <text:p text:style-name="P39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7">步驟：D → E → B → C → A</text:p>
            <text:p text:style-name="P17">結果：D <text:s/>E <text:s/>B <text:s/>C <text:s/>A</text:p>
            <text:p text:style-name="P8"/>
            <text:p text:style-name="P17">口訣：「最後才輪到主人（根）說話」</text:p>
            <text:p text:style-name="P17">應用：計算樹的大小時常用（先算子樹，再算自己）</text:p>
          </table:table-cell>
        </table:table-row>
      </table:table>
      <text:p text:style-name="P8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13">走訪方式</text:p>
            <text:p text:style-name="P25">Preorder（前序）</text:p>
            <text:p text:style-name="P25">Inorder（中序）</text:p>
            <text:p text:style-name="P25">Postorder（後序）</text:p>
          </table:table-cell>
          <table:table-cell table:style-name="表格24.B1" office:value-type="string">
            <text:p text:style-name="P13">結果</text:p>
            <text:p text:style-name="P25">A B D E C</text:p>
            <text:p text:style-name="P25">D B E A C</text:p>
            <text:p text:style-name="P25">D E B C A</text:p>
          </table:table-cell>
        </table:table-row>
      </table:table>
      <text:p text:style-name="P8"/>
      <text:h text:style-name="P6" text:outline-level="2"><text:soft-page-break/><text:span text:style-name="T3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1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17">第1層：A</text:p>
            <text:p text:style-name="P17">第2層：B <text:s/>C</text:p>
            <text:p text:style-name="P17">第3層：D <text:s/>E</text:p>
            <text:p text:style-name="P8"/>
            <text:p text:style-name="P17">Level-order 結果：A <text:s/>B <text:s/>C <text:s/>D <text:s/>E</text:p>
          </table:table-cell>
        </table:table-row>
      </table:table>
      <text:p text:style-name="P25">BFS 使用 Queue（先進先出）：先把 A 放入 Queue → 取出 A，放入 B、C → 取出 B，放入 D、E → 取出 C（無子節點）→ 取出 D → 取出 E</text:p>
      <text:p text:style-name="P8"/>
      <text:h text:style-name="P2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13">DFS（深度優先）</text:p>
            <text:p text:style-name="P25">一路往深處鑽</text:p>
            <text:p text:style-name="P25">使用 Stack（堆疊）/ 遞迴</text:p>
            <text:p text:style-name="P25">三種：Preorder / Inorder / Postorder</text:p>
            <text:p text:style-name="P25">應用：樹走訪、Backtracking、路徑搜尋</text:p>
          </table:table-cell>
          <table:table-cell table:style-name="表格26.B1" office:value-type="string">
            <text:p text:style-name="P13">BFS（廣度優先）</text:p>
            <text:p text:style-name="P25">一層一層掃描</text:p>
            <text:p text:style-name="P25">使用 Queue（佇列）</text:p>
            <text:p text:style-name="P25">一種：Level-order</text:p>
            <text:p text:style-name="P25">應用：最短路徑、社交網路距離</text:p>
          </table:table-cell>
        </table:table-row>
      </table:table>
      <text:p text:style-name="P8"/>
      <text:h text:style-name="P2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7">void preorder(Node* node) {</text:p>
            <text:p text:style-name="P17"><text:s text:c="4"/>if (node == NULL) return; <text:s text:c="2"/>// 邊界條件</text:p>
            <text:p text:style-name="P17"><text:s text:c="4"/>visit(node); <text:s text:c="15"/>// ① 先拜訪自己（根）</text:p>
            <text:p text:style-name="P17"><text:s text:c="4"/>preorder(node-&gt;left); <text:s text:c="6"/>// ② 再遞迴左子樹</text:p>
            <text:p text:style-name="P17"><text:s text:c="4"/>preorder(node-&gt;right); <text:s text:c="5"/>// ③ 最後遞迴右子樹</text:p>
            <text:p text:style-name="P17">}</text:p>
            <text:p text:style-name="P8"/>
            <text:p text:style-name="P17">// Inorder：把 visit 移到 ② 和 ③ 之間</text:p>
            <text:p text:style-name="P17">// Postorder：把 visit 移到最後</text:p>
          </table:table-cell>
        </table:table-row>
      </table:table>
      <text:p text:style-name="Standard"/>
      <text:h text:style-name="P9" text:outline-level="1">第五章：唯一重建樹</text:h>
      <text:h text:style-name="P2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2">組合</text:p>
          </table:table-cell>
          <table:table-cell table:style-name="表格28.A1" office:value-type="string">
            <text:p text:style-name="P12">可唯一重建？</text:p>
          </table:table-cell>
          <table:table-cell table:style-name="表格28.A1" office:value-type="string">
            <text:p text:style-name="P12">原因</text:p>
          </table:table-cell>
        </table:table-row>
        <table:table-row table:style-name="表格28.1">
          <table:table-cell table:style-name="表格28.A2" office:value-type="string">
            <text:p text:style-name="P25">前序 + 中序</text:p>
          </table:table-cell>
          <table:table-cell table:style-name="表格28.B2" office:value-type="string">
            <text:p text:style-name="P33">✅ 可以</text:p>
          </table:table-cell>
          <table:table-cell table:style-name="表格28.C2" office:value-type="string">
            <text:p text:style-name="P25">中序可切出左右子樹</text:p>
          </table:table-cell>
        </table:table-row>
        <table:table-row table:style-name="表格28.1">
          <table:table-cell table:style-name="表格28.A3" office:value-type="string">
            <text:p text:style-name="P25">後序 + 中序</text:p>
          </table:table-cell>
          <table:table-cell table:style-name="表格28.B2" office:value-type="string">
            <text:p text:style-name="P33">✅ 可以</text:p>
          </table:table-cell>
          <table:table-cell table:style-name="表格28.C3" office:value-type="string">
            <text:p text:style-name="P25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25">前序 + 後序</text:p>
          </table:table-cell>
          <table:table-cell table:style-name="表格28.B4" office:value-type="string">
            <text:p text:style-name="P38">❌ 不唯一</text:p>
          </table:table-cell>
          <table:table-cell table:style-name="表格28.C4" office:value-type="string">
            <text:p text:style-name="P25">無法確定左右分界</text:p>
          </table:table-cell>
        </table:table-row>
      </table:table>
      <text:p text:style-name="P8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9">⚠️ 前序 + 後序何時例外可唯一重建？</text:p>
            <text:p text:style-name="P29">→ 只有當樹中沒有 degree=1 的節點（即 Full Binary Tree）時，才能唯一重建。</text:p>
            <text:p text:style-name="P29">→ 若有 degree=1 的節點，則共有 2^k 種可能（k = degree-1 節點數）。</text:p>
            <text:p text:style-name="P29">→ 這就是圖片右欄「前+後=8種（deg-1節數）」的意思！</text:p>
          </table:table-cell>
        </table:table-row>
      </table:table>
      <text:p text:style-name="P8"/>
      <text:h text:style-name="P2" text:outline-level="2">5.2 前序 + 中序重建步驟（完整範例）</text:h>
      <text:p text:style-name="P25">已知：</text:p>
      <text:list text:style-name="WWNum3">
        <text:list-item text:start-value="1">
          <text:p text:style-name="P66">前序（Preorder）：A B C D E F G H I</text:p>
        </text:list-item>
        <text:list-item>
          <text:p text:style-name="P66">中序（Inorder）：B C A E D G H F I</text:p>
        </text:list-item>
      </text:list>
      <text:p text:style-name="P8"/>
      <text:p text:style-name="P25">步驟一：Preorder 第一個 = A = root</text:p>
      <text:p text:style-name="P25">步驟二：在 Inorder 找 A → 左邊 {B C} = 左子樹；右邊 {E D G H F I} = 右子樹</text:p>
      <text:p text:style-name="P25">步驟三：Preorder 中，A 後面2個（B C）對應左子樹 → 第一個 B = 左子樹 root</text:p>
      <text:p text:style-name="P25">步驟四：在 Inorder {B C} 找 B → 左邊 {} 空 → 右邊 {C}</text:p>
      <text:p text:style-name="P25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7">最終重建結果：</text:p>
            <text:p text:style-name="P17"><text:s text:c="12"/>A</text:p>
            <text:p text:style-name="P17"><text:s text:c="11"/>/ \</text:p>
            <text:p text:style-name="P17"><text:s text:c="10"/>B <text:s text:c="2"/>D</text:p>
            <text:p text:style-name="P17"><text:s text:c="11"/>\ <text:s/>/ \</text:p>
            <text:p text:style-name="P17"><text:s text:c="12"/>C E <text:s/>F</text:p>
            <text:p text:style-name="P17"><text:s text:c="14"/>/ / \</text:p>
            <text:p text:style-name="P17"><text:s text:c="13"/>G H <text:s text:c="2"/>I</text:p>
            <text:p text:style-name="P17">（注意：這是113高考Q1的典型題型）</text:p>
          </table:table-cell>
        </table:table-row>
      </table:table>
      <text:p text:style-name="Standard"/>
      <text:h text:style-name="P9" text:outline-level="1">第六章：Complete Binary Tree vs Full Binary Tree</text:h>
      <text:h text:style-name="P2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0">定義：</text:p>
            <text:p text:style-name="P10">1. 除了最後一層，其餘各層節點數都要全滿。</text:p>
            <text:p text:style-name="P10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32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 /</text:p>
                  <text:p text:style-name="P17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37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9"/>/</text:p>
                  <text:p text:style-name="P17"><text:s text:c="8"/>D</text:p>
                </table:table-cell>
              </table:table-row>
            </table:table>
            <text:p text:style-name="P25">最後一層的 D 在右邊，左邊是空的 → 違反靠左規則</text:p>
          </table:table-cell>
        </table:table-row>
      </table:table>
      <text:p text:style-name="P8"/>
      <text:h text:style-name="P2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0">定義（圖片考試筆記原文）：除末層外全滿 2 層，末層靠左</text:p>
            <text:p text:style-name="P7"/>
            <text:p text:style-name="P10">前 h-1 層節點數（全滿）：2^(h-1) − 1</text:p>
            <text:p text:style-name="P10">末層至少 1 個：總節點數 ≥ 2^(h-1) − 1 + 1 = 2^(h-1)</text:p>
            <text:p text:style-name="P10">末層全滿時：總節點數 ≤ 2^(h-1) − 1 + 2^(h-1) = 2^h − 1</text:p>
            <text:p text:style-name="P7"/>
            <text:p text:style-name="P10">結論：2^(h-1) ≤ n ≤ 2^h − 1 <text:s/>（就是考試筆記中的公式！）</text:p>
          </table:table-cell>
        </table:table-row>
      </table:table>
      <text:p text:style-name="P8"/>
      <text:h text:style-name="P2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41">定義：每個節點的子節點數只能是 0 或 2，不能是 1。</text:p>
            <text:p text:style-name="P41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32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37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17"><text:s text:c="4"/>A</text:p>
                  <text:p text:style-name="P17"><text:s text:c="3"/>/</text:p>
                  <text:p text:style-name="P17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8"><text:soft-page-break/></text:p>
      <text:h text:style-name="P2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13">Complete Binary Tree</text:p>
            <text:p text:style-name="P25">限制「形狀」</text:p>
            <text:p text:style-name="P25">最後一層靠左</text:p>
            <text:p text:style-name="P25">Heap 一定是 CBT</text:p>
            <text:p text:style-name="P25">可以有 degree=1 的節點</text:p>
          </table:table-cell>
          <table:table-cell table:style-name="表格38.B1" office:value-type="string">
            <text:p text:style-name="P13">Full Binary Tree</text:p>
            <text:p text:style-name="P25">限制「每個節點的度數」</text:p>
            <text:p text:style-name="P25">每節點 0 或 2 個 child</text:p>
            <text:p text:style-name="P25">不一定是 CBT</text:p>
            <text:p text:style-name="P25">degree=1 的節點一個也沒有</text:p>
          </table:table-cell>
        </table:table-row>
      </table:table>
      <text:p text:style-name="Standard"/>
      <text:h text:style-name="P9" text:outline-level="1">第七章：Heap 與 Priority Queue</text:h>
      <text:h text:style-name="P2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42">Heap = 完全二元樹（Complete Binary Tree）+ 父子大小關係</text:p>
            <text:p text:style-name="P7"/>
            <text:p text:style-name="P42">Max Heap：每個父節點 ≥ 子節點（最大值永遠在 root）</text:p>
            <text:p text:style-name="P42">Min Heap：每個父節點 ≤ 子節點（最小值永遠在 root）</text:p>
          </table:table-cell>
        </table:table-row>
      </table:table>
      <text:p text:style-name="P8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13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17"><text:s text:c="6"/>100</text:p>
                  <text:p text:style-name="P17"><text:s text:c="5"/>/ <text:s text:c="2"/>\</text:p>
                  <text:p text:style-name="P17"><text:s text:c="4"/>80 <text:s text:c="3"/>50</text:p>
                  <text:p text:style-name="P17"><text:s text:c="3"/>/ <text:s/>\</text:p>
                  <text:p text:style-name="P17"><text:s text:c="2"/>30 <text:s text:c="2"/>20</text:p>
                </table:table-cell>
              </table:table-row>
            </table:table>
            <text:p text:style-name="P25">100 ≥ 80 ≥ 50 ≥ 30 ≥ 20 <text:s/>✔</text:p>
          </table:table-cell>
          <table:table-cell table:style-name="表格42.B1" office:value-type="string">
            <text:p text:style-name="P13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17"><text:s text:c="7"/>10</text:p>
                  <text:p text:style-name="P17"><text:s text:c="6"/>/ <text:s/>\</text:p>
                  <text:p text:style-name="P17"><text:s text:c="4"/>20 <text:s text:c="3"/>15</text:p>
                  <text:p text:style-name="P17"><text:s text:c="3"/>/ <text:s/>\</text:p>
                  <text:p text:style-name="P17"><text:s text:c="2"/>30 <text:s text:c="2"/>25</text:p>
                </table:table-cell>
              </table:table-row>
            </table:table>
            <text:p text:style-name="P25">10 ≤ 20 ≤ 30 ≤ 25 <text:s/>✔</text:p>
          </table:table-cell>
        </table:table-row>
      </table:table>
      <text:p text:style-name="P8"/>
      <text:h text:style-name="P2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9">Heap：只管「父 &gt; 子」（或父 &lt; 子），左右之間沒有大小關係</text:p>
            <text:p text:style-name="P29">BST：嚴格規定「左 &lt; 根 &lt; 右」</text:p>
            <text:p text:style-name="P7"/>
            <text:p text:style-name="P29">例： <text:s text:c="6"/>100 <text:s text:c="10"/>← Max Heap ✅（100&gt;80, 100&gt;50）</text:p>
            <text:p text:style-name="P29"><text:s text:c="10"/>/ <text:s text:c="2"/>\</text:p>
            <text:p text:style-name="P29"><text:s text:c="9"/>80 <text:s text:c="3"/>50 <text:s text:c="7"/>← Heap 合法，但 BST 不合法</text:p>
            <text:p text:style-name="P29"><text:s text:c="25"/>（BST 右邊要比 80 大，但 50 &lt; 80）</text:p>
          </table:table-cell>
        </table:table-row>
      </table:table>
      <text:p text:style-name="P8"/>
      <text:h text:style-name="P2" text:outline-level="2">7.3 Priority Queue（優先權佇列）</text:h>
      <text:p text:style-name="P25">現實比喻：急診室掛號——不是先來先看診，而是重傷優先。</text:p>
      <text:p text:style-name="P25">Heap 最適合實作 Priority Queue，因為：</text:p>
      <text:list text:continue-numbering="true" text:style-name="WWNum3">
        <text:list-item>
          <text:p text:style-name="P66">取出最大（或最小）值：只需取出 root → O(log n)</text:p>
        </text:list-item>
        <text:list-item>
          <text:p text:style-name="P66">插入新值：放在最後，向上浮（Sift Up）→ O(log n)</text:p>
        </text:list-item>
        <text:list-item>
          <text:p text:style-name="P66">Heap Sort 利用 Max Heap，可排序整個陣列 → O(n log n)</text:p>
        </text:list-item>
      </text:list>
      <text:p text:style-name="P8"/>
      <text:h text:style-name="P2" text:outline-level="2">7.4 Heap 的陣列表示</text:h>
      <text:p text:style-name="P25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7">index: <text:s/>1 <text:s text:c="2"/>2 <text:s text:c="2"/>3 <text:s text:c="2"/>4 <text:s text:c="2"/>5 <text:s text:c="2"/>6 <text:s text:c="2"/>7</text:p>
            <text:p text:style-name="P17">value: 100 <text:s/>80 <text:s/>50 <text:s/>30 <text:s/>20 <text:s/>.. <text:s/>..</text:p>
            <text:p text:style-name="P8"/>
            <text:p text:style-name="P8"><text:soft-page-break/><text:span text:style-name="T4">規則：</text:span></text:p>
            <text:p text:style-name="P17"><text:s text:c="2"/>root <text:s text:c="7"/>= a[1]</text:p>
            <text:p text:style-name="P17"><text:s text:c="2"/>left child <text:s/>= a[2i]</text:p>
            <text:p text:style-name="P17"><text:s text:c="2"/>right child = a[2i+1]</text:p>
            <text:p text:style-name="P17"><text:s text:c="2"/>parent <text:s text:c="5"/>= a[⌊i/2⌋]</text:p>
          </table:table-cell>
        </table:table-row>
      </table:table>
      <text:p text:style-name="Standard"/>
      <text:h text:style-name="P9" text:outline-level="1">第八章：陣列表示法（Array Representation）</text:h>
      <text:h text:style-name="P2" text:outline-level="2">8.1 為什麼可以用陣列？</text:h>
      <text:p text:style-name="P25">完全二元樹的形狀非常規律，因此可以直接用一維陣列儲存，不需要指標（pointer）。</text:p>
      <text:h text:style-name="P2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root <text:s text:c="7"/>= a[1]（注意：通常從 index=1 開始，不是 0）</text:p>
            <text:p text:style-name="P10">left child <text:s/>= a[2i]</text:p>
            <text:p text:style-name="P10">right child = a[2i+1]</text:p>
            <text:p text:style-name="P10">parent <text:s text:c="5"/>= a[⌊i/2⌋]（整數除法）</text:p>
          </table:table-cell>
        </table:table-row>
      </table:table>
      <text:p text:style-name="P8"/>
      <text:h text:style-name="P2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7"><text:s text:c="10"/>a[1]=A</text:p>
            <text:p text:style-name="P17"><text:s text:c="9"/>/ <text:s text:c="5"/>\</text:p>
            <text:p text:style-name="P17"><text:s text:c="6"/>a[2]=B <text:s text:c="3"/>a[3]=C</text:p>
            <text:p text:style-name="P17"><text:s text:c="6"/>/ <text:s text:c="3"/>\ <text:s text:c="3"/>/ <text:s text:c="3"/>\</text:p>
            <text:p text:style-name="P17"><text:s text:c="2"/>a[4]=D a[5]=E a[6]=F a[7]=G</text:p>
            <text:p text:style-name="P8"/>
            <text:p text:style-name="P17">驗證：</text:p>
            <text:p text:style-name="P17"><text:s text:c="2"/>i=1（A）→ left=a[2]=B ✔, right=a[3]=C ✔</text:p>
            <text:p text:style-name="P17"><text:s text:c="2"/>i=2（B）→ left=a[4]=D ✔, right=a[5]=E ✔</text:p>
            <text:p text:style-name="P17"><text:s text:c="2"/>i=3（C）→ left=a[6]=F ✔, right=a[7]=G ✔</text:p>
            <text:p text:style-name="P17"><text:s text:c="2"/>i=4（D）→ parent=a[2]=B ✔</text:p>
            <text:p text:style-name="P17"><text:s text:c="2"/>i=5（E）→ parent=a[2]=B ✔（5/2=2 整數除法）</text:p>
            <text:p text:style-name="P17"><text:s text:c="2"/>i=6（F）→ parent=a[3]=C ✔</text:p>
            <text:p text:style-name="P17"><text:s text:c="2"/>i=1024 → parent=a[512] ✔（圖片原文：2×512=1024）</text:p>
          </table:table-cell>
        </table:table-row>
      </table:table>
      <text:p text:style-name="P8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9">⚠️ 偏斜樹（Skewed Tree）的陣列浪費問題</text:p>
            <text:p text:style-name="P7"/>
            <text:p text:style-name="P29">偏斜樹高度 h 時只有 h 個節點，但陣列需要 2^h − 1 個空間。</text:p>
            <text:p text:style-name="P29">例：右偏斜樹 4 層（4 個節點）需要 2^4 − 1 = 15 個陣列空間，浪費了 11 格。</text:p>
            <text:p text:style-name="P29">→ 這就是「偏斜樹 = 最浪費」的原因（圖片考試筆記原文）。</text:p>
          </table:table-cell>
        </table:table-row>
      </table:table>
      <text:p text:style-name="Standard"/>
      <text:h text:style-name="P9" text:outline-level="1">第九章：歷屆考題詳解</text:h>
      <text:p text:style-name="P8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31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24">題目：</text:p>
            <text:p text:style-name="P24"><text:s text:c="2"/>中序（Inorder）：F B A C E I H J G E（圖片原文：FBAC IH JGE）</text:p>
            <text:p text:style-name="P24"><text:s text:c="2"/>後序（Postorder）：原文最後一個為 E</text:p>
            <text:p text:style-name="P7"/>
            <text:p text:style-name="P24">解題步驟：</text:p>
            <text:p text:style-name="P24">1. 後序最後一個 = E = root</text:p>
            <text:p text:style-name="P24">2. 在中序找 E，E 左邊 = 左子樹，右邊 = 右子樹</text:p>
            <text:p text:style-name="P24">3. 繼續遞迴：後序第二最後 = 右子樹 root，以此類推</text:p>
            <text:p text:style-name="P7"/>
            <text:p text:style-name="P24">重點：後序 + 中序一定能唯一重建！</text:p>
          </table:table-cell>
        </table:table-row>
      </table:table>
      <text:p text:style-name="P8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31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24">題目：前序=ABCD，後序=DCBA，問共有幾種可能的二元樹？</text:p>
            <text:p text:style-name="P7"/>
            <text:p text:style-name="P24">分析：</text:p>
            <text:p text:style-name="P24">• 前序第一個=A=root，後序最後一個=A ✔</text:p>
            <text:p text:style-name="P24">• 前序第二個=B → B可以是A的左child或右child（兩種）</text:p>
            <text:p text:style-name="P24">• 每個 internal node（A,B,C）各有「貼左或右」2個選擇</text:p>
            <text:p text:style-name="P24">• 共 3 個這樣的節點 → 2³ = 8 種</text:p>
            <text:p text:style-name="P7"/>
            <text:p text:style-name="P24">★ 圖片原文：「共8種可能（deg-1節可貼左子或右子）」</text:p>
          </table:table-cell>
        </table:table-row>
      </table:table>
      <text:p text:style-name="P8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31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24">題目：證明 Complete Binary Tree 節點數 n 滿足 2^(h-1) ≤ n ≤ 2^h − 1</text:p>
            <text:p text:style-name="P7"/>
            <text:p text:style-name="P24">前 h-1 層全滿：節點數 = 2^(h-1) − 1</text:p>
            <text:p text:style-name="P24">下界：最後層至少 1 個 → n ≥ 2^(h-1) − 1 + 1 = 2^(h-1) <text:s/>✔</text:p>
            <text:p text:style-name="P24">上界：最後層全滿 → n ≤ 2^(h-1) − 1 + 2^(h-1) = 2^h − 1 <text:s/>✔</text:p>
            <text:p text:style-name="P24">→ 得證 2^(h-1) ≤ n ≤ 2^h − 1 <text:s/>(整理)</text:p>
          </table:table-cell>
        </table:table-row>
      </table:table>
      <text:p text:style-name="P8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31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24">題目：用 1D 陣列存樹，root=a[1], left=a[2i], right=a[2i+1]</text:p>
            <text:p text:style-name="P24"><text:s text:c="6"/>引申：1024 的節點 parent=？ <text:s/>right=？</text:p>
            <text:p text:style-name="P7"/>
            <text:p text:style-name="P24">計算：</text:p>
            <text:p text:style-name="P24">• parent(1024) = ⌊1024/2⌋ = 512</text:p>
            <text:p text:style-name="P7"><text:soft-page-break/><text:span text:style-name="T2">• right(1024) <text:s/>= 2×1024+1 <text:s/>= 2049</text:span></text:p>
            <text:p text:style-name="P7"/>
            <text:p text:style-name="P24">★ 偏斜樹（Skewed Tree）：所有節點只有右 child（或只有左 child）</text:p>
            <text:p text:style-name="P24"><text:s text:c="3"/>→ 空間利用率最低，高度 h 只存 h 個節點，但陣列要 2^h−1 格</text:p>
          </table:table-cell>
        </table:table-row>
      </table:table>
      <text:p text:style-name="Standard"/>
      <text:h text:style-name="P9" text:outline-level="1">第十章：公職考試必考重點總整理</text:h>
      <text:h text:style-name="P2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2">公式</text:p>
          </table:table-cell>
          <table:table-cell table:style-name="表格52.A1" office:value-type="string">
            <text:p text:style-name="P12">數學式</text:p>
          </table:table-cell>
          <table:table-cell table:style-name="表格52.A1" office:value-type="string">
            <text:p text:style-name="P12">記憶口訣</text:p>
          </table:table-cell>
        </table:table-row>
        <table:table-row table:style-name="表格52.1">
          <table:table-cell table:style-name="表格52.A2" office:value-type="string">
            <text:p text:style-name="P25">分支數</text:p>
          </table:table-cell>
          <table:table-cell table:style-name="表格52.B2" office:value-type="string">
            <text:p text:style-name="P20">n − 1</text:p>
          </table:table-cell>
          <table:table-cell table:style-name="表格52.C2" office:value-type="string">
            <text:p text:style-name="P25">n個節點n-1條線</text:p>
          </table:table-cell>
        </table:table-row>
        <table:table-row table:style-name="表格52.1">
          <table:table-cell table:style-name="表格52.A3" office:value-type="string">
            <text:p text:style-name="P25">葉節點數</text:p>
          </table:table-cell>
          <table:table-cell table:style-name="表格52.B2" office:value-type="string">
            <text:p text:style-name="P20">n0 = n2 + 1</text:p>
          </table:table-cell>
          <table:table-cell table:style-name="表格52.C3" office:value-type="string">
            <text:p text:style-name="P25">葉比度2多一個</text:p>
          </table:table-cell>
        </table:table-row>
        <table:table-row table:style-name="表格52.1">
          <table:table-cell table:style-name="表格52.A4" office:value-type="string">
            <text:p text:style-name="P25">滿二元樹節點</text:p>
          </table:table-cell>
          <table:table-cell table:style-name="表格52.B2" office:value-type="string">
            <text:p text:style-name="P20">2^h − 1</text:p>
          </table:table-cell>
          <table:table-cell table:style-name="表格52.C4" office:value-type="string">
            <text:p text:style-name="P25">等比級數求和</text:p>
          </table:table-cell>
        </table:table-row>
        <table:table-row table:style-name="表格52.1">
          <table:table-cell table:style-name="表格52.A5" office:value-type="string">
            <text:p text:style-name="P25">CBT節點範圍</text:p>
          </table:table-cell>
          <table:table-cell table:style-name="表格52.B2" office:value-type="string">
            <text:p text:style-name="P20">2^(h−1) ≤ n ≤ 2^h−1</text:p>
          </table:table-cell>
          <table:table-cell table:style-name="表格52.C5" office:value-type="string">
            <text:p text:style-name="P25">夾住中間</text:p>
          </table:table-cell>
        </table:table-row>
        <table:table-row table:style-name="表格52.1">
          <table:table-cell table:style-name="表格52.A6" office:value-type="string">
            <text:p text:style-name="P25">陣列左子</text:p>
          </table:table-cell>
          <table:table-cell table:style-name="表格52.B2" office:value-type="string">
            <text:p text:style-name="P20">a[2i]</text:p>
          </table:table-cell>
          <table:table-cell table:style-name="表格52.C6" office:value-type="string">
            <text:p text:style-name="P25">乘2</text:p>
          </table:table-cell>
        </table:table-row>
        <table:table-row table:style-name="表格52.1">
          <table:table-cell table:style-name="表格52.A7" office:value-type="string">
            <text:p text:style-name="P25">陣列右子</text:p>
          </table:table-cell>
          <table:table-cell table:style-name="表格52.B2" office:value-type="string">
            <text:p text:style-name="P20">a[2i+1]</text:p>
          </table:table-cell>
          <table:table-cell table:style-name="表格52.C7" office:value-type="string">
            <text:p text:style-name="P25">乘2加1</text:p>
          </table:table-cell>
        </table:table-row>
        <table:table-row table:style-name="表格52.1">
          <table:table-cell table:style-name="表格52.A8" office:value-type="string">
            <text:p text:style-name="P25">陣列父節點</text:p>
          </table:table-cell>
          <table:table-cell table:style-name="表格52.B2" office:value-type="string">
            <text:p text:style-name="P20">a[⌊i/2⌋]</text:p>
          </table:table-cell>
          <table:table-cell table:style-name="表格52.C8" office:value-type="string">
            <text:p text:style-name="P25">除2取整</text:p>
          </table:table-cell>
        </table:table-row>
        <table:table-row table:style-name="表格52.1">
          <table:table-cell table:style-name="表格52.A9" office:value-type="string">
            <text:p text:style-name="P25">BST Inorder</text:p>
          </table:table-cell>
          <table:table-cell table:style-name="表格52.B2" office:value-type="string">
            <text:p text:style-name="P20">遞增排序</text:p>
          </table:table-cell>
          <table:table-cell table:style-name="表格52.C9" office:value-type="string">
            <text:p text:style-name="P25">中序有序</text:p>
          </table:table-cell>
        </table:table-row>
      </table:table>
      <text:p text:style-name="P8"/>
      <text:h text:style-name="P2" text:outline-level="2">10.2 考試題型速查</text:h>
      <text:list text:continue-numbering="true" text:style-name="WWNum3">
        <text:list-item>
          <text:p text:style-name="P67">Traversal（走訪）：給樹求前/中/後序 → 記住「根的位置」</text:p>
        </text:list-item>
        <text:list-item>
          <text:p text:style-name="P67">重建樹：給前序+中序 → 前序第一個是根，中序切左右</text:p>
        </text:list-item>
        <text:list-item>
          <text:p text:style-name="P67">前序+後序不唯一 → degree-1 節點每個有2種可能 → 2^k 種</text:p>
        </text:list-item>
        <text:list-item>
          <text:p text:style-name="P67">BST 插入刪除 → 刪除兩個子節點最難，找右子樹最小值補位</text:p>
        </text:list-item>
        <text:list-item>
          <text:p text:style-name="P67">Complete Binary Tree 判斷 → 最後一層要靠左</text:p>
        </text:list-item>
        <text:list-item>
          <text:p text:style-name="P67">陣列表示法 → parent=i/2, left=2i, right=2i+1</text:p>
        </text:list-item>
        <text:list-item>
          <text:p text:style-name="P67">Heap Sort → 建 Max Heap → 依序取出 root → O(n log n)</text:p>
        </text:list-item>
        <text:list-item>
          <text:p text:style-name="P67">偏斜樹 → 最浪費空間，等同 Linked List</text:p>
        </text:list-item>
      </text:list>
      <text:p text:style-name="P8"/>
      <text:h text:style-name="P2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4">✅ ChatGPT 的大部分說明都正確，以下補充被省略的細節：</text:p>
            <text:p text:style-name="P7"/>
            <text:p text:style-name="P34">1. n0 = n2 + 1 的公式推導 → ChatGPT 有說到 n0,n2 但沒有完整推導</text:p>
            <text:p text:style-name="P34">2. 前序+後序不唯一的精確說法：有 k 個 degree-1 節點 → 2^k 種可能</text:p>
            <text:p text:style-name="P34"><text:s text:c="3"/>（不是「通常不行」，是「有多少個 degree-1 就有多少倍的不確定性」）</text:p>
            <text:p text:style-name="P34">3. 偏斜樹（Skewed Tree）的概念 → ChatGPT 後期有提到但說明較少</text:p>
            <text:p text:style-name="P34">4. 114 Q1 的 8 種可能 → 來自 3 個 degree-1 節點各有 2 選擇（2^3=8）</text:p>
            <text:p text:style-name="P34">5. Complete Binary Tree 公式推導（115 Q2）→ 上下界各需分開說明</text:p>
            <text:p text:style-name="P34">6. 樹高定義有兩種（從 0 or 1 開始）→ 考試務必注意題目</text:p>
          </table:table-cell>
        </table:table-row>
      </table:table>
      <text:p text:style-name="Standard"/>
      <text:h text:style-name="P9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0">◆ Binary Tree：每節點最多 2 個 child</text:p>
            <text:p text:style-name="P10">◆ 分支 = n−1 | 葉(n0) = 度2節點(n2) + 1</text:p>
            <text:p text:style-name="P10">◆ Preorder:根左右 | Inorder:左根右 | Postorder:左右根</text:p>
            <text:p text:style-name="P10">◆ BST Inorder = 遞增排序</text:p>
            <text:p text:style-name="P10">◆ 前序+中序 → 唯一重建 ✅ | 後序+中序 → 唯一重建 ✅</text:p>
            <text:p text:style-name="P10">◆ 前序+後序 → 不唯一（有 k 個 degree-1 節點 → 2^k 種）</text:p>
            <text:p text:style-name="P10">◆ Complete BT：最後層靠左 | Full BT：每節點 0 or 2 個 child</text:p>
            <text:p text:style-name="P10">◆ 2^(h−1) ≤ n ≤ 2^h−1（Complete BT 節點範圍）</text:p>
            <text:p text:style-name="P10">◆ Heap = CBT + 父子大小規則 | Max Heap root = 最大值</text:p>
            <text:p text:style-name="P10">◆ Heap ≠ BST（Heap 左右不保證大小順序）</text:p>
            <text:p text:style-name="P10">◆ 陣列：left=a[2i], right=a[2i+1], parent=a[⌊i/2⌋]</text:p>
            <text:p text:style-name="P10">◆ 偏斜樹 = 最浪費空間</text:p>
            <text:p text:style-name="P10">◆ BFS 用 Queue | DFS 用 Stack / 遞迴</text:p>
          </table:table-cell>
        </table:table-row>
      </table:table>
      <text:p text:style-name="P8"/>
      <text:p text:style-name="P8"/>
      <text:p text:style-name="P27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46</meta:editing-cycles>
    <meta:creation-date>2026-05-28T00:04:25.669000000</meta:creation-date>
    <dc:date>2026-05-28T16:19:50.747000000</dc:date>
    <meta:generator>MODA_ODF_Application_Tools/3.8.4.2$Windows_X86_64 LibreOffice_project/4fb77107d5af14329e08085efe4fa19b5633383a</meta:generator>
    <meta:editing-duration>PT8H8M</meta:editing-duration>
    <meta:document-statistic meta:table-count="112" meta:image-count="0" meta:object-count="0" meta:page-count="31" meta:paragraph-count="957" meta:word-count="9463" meta:character-count="18016" meta:non-whitespace-character-count="13292"/>
  </office:meta>
</office:document-meta>
</file>