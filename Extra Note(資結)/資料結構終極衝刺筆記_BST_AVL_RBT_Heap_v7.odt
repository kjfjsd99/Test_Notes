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7.18cm" fo:margin-left="0.009cm" fo:margin-top="0cm" fo:margin-bottom="0cm" table:align="left" style:writing-mode="page"/>
    </style:style>
    <style:style style:name="表格1.A" style:family="table-column">
      <style:table-column-properties style:column-width="0.917cm"/>
    </style:style>
    <style:style style:name="表格1.B" style:family="table-column">
      <style:table-column-properties style:column-width="2.997cm"/>
    </style:style>
    <style:style style:name="表格1.C" style:family="table-column">
      <style:table-column-properties style:column-width="13.266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e9f5ea" fo:padding-left="0.194cm" fo:padding-right="0.159cm" fo:padding-top="0.106cm" fo:padding-bottom="0.106cm" fo:border="0.5pt solid #2e7d32">
        <style:background-image/>
      </style:table-cell-properties>
    </style:style>
    <style:style style:name="表格1.C1" style:family="table-cell">
      <style:table-cell-properties fo:background-color="#ffffff" fo:padding-left="0.194cm" fo:padding-right="0.159cm" fo:padding-top="0.106cm" fo:padding-bottom="0.106cm" fo:border="0.5pt solid #d8dee4">
        <style:background-image/>
      </style:table-cell-properties>
    </style:style>
    <style:style style:name="表格1.A2" style:family="table-cell">
      <style:table-cell-properties fo:background-color="#fff6da" fo:padding-left="0.194cm" fo:padding-right="0.159cm" fo:padding-top="0.106cm" fo:padding-bottom="0.106cm" fo:border="0.5pt solid #c99400">
        <style:background-image/>
      </style:table-cell-properties>
    </style:style>
    <style:style style:name="表格1.A3" style:family="table-cell">
      <style:table-cell-properties fo:background-color="#fbeae8" fo:padding-left="0.194cm" fo:padding-right="0.159cm" fo:padding-top="0.106cm" fo:padding-bottom="0.106cm" fo:border="0.5pt solid #c0392b">
        <style:background-image/>
      </style:table-cell-properties>
    </style:style>
    <style:style style:name="表格1.A4" style:family="table-cell">
      <style:table-cell-properties fo:background-color="#e8f1f9" fo:padding-left="0.194cm" fo:padding-right="0.159cm" fo:padding-top="0.106cm" fo:padding-bottom="0.106cm" fo:border="0.5pt solid #1f6fb2">
        <style:background-image/>
      </style:table-cell-properties>
    </style:style>
    <style:style style:name="表格2" style:family="table">
      <style:table-properties style:width="17.18cm" fo:margin-left="0.005cm" fo:margin-top="0cm" fo:margin-bottom="0cm" table:align="left" style:writing-mode="page"/>
    </style:style>
    <style:style style:name="表格2.A" style:family="table-column">
      <style:table-column-properties style:column-width="3.261cm"/>
    </style:style>
    <style:style style:name="表格2.B" style:family="table-column">
      <style:table-column-properties style:column-width="3.794cm"/>
    </style:style>
    <style:style style:name="表格2.C" style:family="table-column">
      <style:table-column-properties style:column-width="2.485cm"/>
    </style:style>
    <style:style style:name="表格2.D" style:family="table-column">
      <style:table-column-properties style:column-width="2.487cm"/>
    </style:style>
    <style:style style:name="表格2.E" style:family="table-column">
      <style:table-column-properties style:column-width="2.489cm"/>
    </style:style>
    <style:style style:name="表格2.F" style:family="table-column">
      <style:table-column-properties style:column-width="2.663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1b3a5c" fo:padding-left="0.194cm" fo:padding-right="0.159cm" fo:padding-top="0.123cm" fo:padding-bottom="0.123cm" fo:border="0.35pt solid #b8c2cc">
        <style:background-image/>
      </style:table-cell-properties>
    </style:style>
    <style:style style:name="表格2.A2" style:family="table-cell">
      <style:table-cell-properties style:vertical-align="middle" fo:background-color="#ffffff" fo:padding-left="0.194cm" fo:padding-right="0.159cm" fo:padding-top="0.106cm" fo:padding-bottom="0.106cm" fo:border="0.35pt solid #b8c2cc">
        <style:background-image/>
      </style:table-cell-properties>
    </style:style>
    <style:style style:name="表格2.A3" style:family="table-cell">
      <style:table-cell-properties style:vertical-align="middle" fo:background-color="#f4f7fa" fo:padding-left="0.194cm" fo:padding-right="0.159cm" fo:padding-top="0.106cm" fo:padding-bottom="0.106cm" fo:border="0.35pt solid #b8c2cc">
        <style:background-image/>
      </style:table-cell-properties>
    </style:style>
    <style:style style:name="表格3" style:family="table">
      <style:table-properties style:width="17.18cm" fo:margin-left="0.056cm" fo:margin-top="0cm" fo:margin-bottom="0cm" table:align="left" style:writing-mode="page"/>
    </style:style>
    <style:style style:name="表格3.A" style:family="table-column">
      <style:table-column-properties style:column-width="17.18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9f5ea" fo:padding-left="0.3cm" fo:padding-right="0.247cm" fo:padding-top="0.159cm" fo:padding-bottom="0.159cm" fo:border-left="3.25pt solid #2e7d32" fo:border-right="0.5pt solid #2e7d32" fo:border-top="0.5pt solid #2e7d32" fo:border-bottom="0.5pt solid #2e7d32">
        <style:background-image/>
      </style:table-cell-properties>
    </style:style>
    <style:style style:name="表格4" style:family="table">
      <style:table-properties style:width="17.18cm" fo:margin-left="0.056cm" fo:margin-top="0cm" fo:margin-bottom="0cm" table:align="left" style:writing-mode="page"/>
    </style:style>
    <style:style style:name="表格4.A" style:family="table-column">
      <style:table-column-properties style:column-width="17.1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beae8" fo:padding-left="0.3cm" fo:padding-right="0.247cm" fo:padding-top="0.159cm" fo:padding-bottom="0.159cm" fo:border-left="3.25pt solid #c0392b" fo:border-right="0.5pt solid #c0392b" fo:border-top="0.5pt solid #c0392b" fo:border-bottom="0.5pt solid #c0392b">
        <style:background-image/>
      </style:table-cell-properties>
    </style:style>
    <style:style style:name="表格5" style:family="table">
      <style:table-properties style:width="17.18cm" fo:margin-left="0.005cm" fo:margin-top="0cm" fo:margin-bottom="0cm" table:align="left" style:writing-mode="page"/>
    </style:style>
    <style:style style:name="表格5.A" style:family="table-column">
      <style:table-column-properties style:column-width="3.087cm"/>
    </style:style>
    <style:style style:name="表格5.B" style:family="table-column">
      <style:table-column-properties style:column-width="2.203cm"/>
    </style:style>
    <style:style style:name="表格5.C" style:family="table-column">
      <style:table-column-properties style:column-width="4.833cm"/>
    </style:style>
    <style:style style:name="表格5.D" style:family="table-column">
      <style:table-column-properties style:column-width="7.057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1b3a5c" fo:padding-left="0.194cm" fo:padding-right="0.159cm" fo:padding-top="0.123cm" fo:padding-bottom="0.123cm" fo:border="0.35pt solid #b8c2cc">
        <style:background-image/>
      </style:table-cell-properties>
    </style:style>
    <style:style style:name="表格5.A2" style:family="table-cell">
      <style:table-cell-properties style:vertical-align="middle" fo:background-color="#ffffff" fo:padding-left="0.194cm" fo:padding-right="0.159cm" fo:padding-top="0.106cm" fo:padding-bottom="0.106cm" fo:border="0.35pt solid #b8c2cc">
        <style:background-image/>
      </style:table-cell-properties>
    </style:style>
    <style:style style:name="表格5.A3" style:family="table-cell">
      <style:table-cell-properties style:vertical-align="middle" fo:background-color="#f4f7fa" fo:padding-left="0.194cm" fo:padding-right="0.159cm" fo:padding-top="0.106cm" fo:padding-bottom="0.106cm" fo:border="0.35pt solid #b8c2cc">
        <style:background-image/>
      </style:table-cell-properties>
    </style:style>
    <style:style style:name="表格6" style:family="table">
      <style:table-properties style:width="17.18cm" fo:margin-left="0.056cm" fo:margin-top="0cm" fo:margin-bottom="0cm" table:align="left" style:writing-mode="page"/>
    </style:style>
    <style:style style:name="表格6.A" style:family="table-column">
      <style:table-column-properties style:column-width="17.18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e8f1f9" fo:padding-left="0.3cm" fo:padding-right="0.247cm" fo:padding-top="0.159cm" fo:padding-bottom="0.159cm" fo:border-left="3.25pt solid #1f6fb2" fo:border-right="0.5pt solid #1f6fb2" fo:border-top="0.5pt solid #1f6fb2" fo:border-bottom="0.5pt solid #1f6fb2">
        <style:background-image/>
      </style:table-cell-properties>
    </style:style>
    <style:style style:name="表格7" style:family="table">
      <style:table-properties style:width="17.18cm" fo:margin-left="0.056cm" fo:margin-top="0cm" fo:margin-bottom="0cm" table:align="left" style:writing-mode="page"/>
    </style:style>
    <style:style style:name="表格7.A" style:family="table-column">
      <style:table-column-properties style:column-width="17.1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3f5" fo:padding-left="0.3cm" fo:padding-right="0.247cm" fo:padding-top="0.159cm" fo:padding-bottom="0.159cm" fo:border-left="3.25pt solid #9aa4ad" fo:border-right="0.5pt solid #c9ced4" fo:border-top="0.5pt solid #c9ced4" fo:border-bottom="0.5pt solid #c9ced4">
        <style:background-image/>
      </style:table-cell-properties>
    </style:style>
    <style:style style:name="表格8" style:family="table">
      <style:table-properties style:width="17.18cm" fo:margin-left="0.056cm" fo:margin-top="0cm" fo:margin-bottom="0cm" table:align="left" style:writing-mode="page"/>
    </style:style>
    <style:style style:name="表格8.A" style:family="table-column">
      <style:table-column-properties style:column-width="17.18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ff6da" fo:padding-left="0.3cm" fo:padding-right="0.247cm" fo:padding-top="0.159cm" fo:padding-bottom="0.159cm" fo:border-left="3.25pt solid #c99400" fo:border-right="0.5pt solid #c99400" fo:border-top="0.5pt solid #c99400" fo:border-bottom="0.5pt solid #c99400">
        <style:background-image/>
      </style:table-cell-properties>
    </style:style>
    <style:style style:name="表格9" style:family="table">
      <style:table-properties style:width="17.18cm" fo:margin-left="0.005cm" fo:margin-top="0cm" fo:margin-bottom="0cm" table:align="left" style:writing-mode="page"/>
    </style:style>
    <style:style style:name="表格9.A" style:family="table-column">
      <style:table-column-properties style:column-width="3.967cm"/>
    </style:style>
    <style:style style:name="表格9.B" style:family="table-column">
      <style:table-column-properties style:column-width="7.057cm"/>
    </style:style>
    <style:style style:name="表格9.C" style:family="table-column">
      <style:table-column-properties style:column-width="6.156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1b3a5c" fo:padding-left="0.194cm" fo:padding-right="0.159cm" fo:padding-top="0.123cm" fo:padding-bottom="0.123cm" fo:border="0.35pt solid #b8c2cc">
        <style:background-image/>
      </style:table-cell-properties>
    </style:style>
    <style:style style:name="表格9.A2" style:family="table-cell">
      <style:table-cell-properties style:vertical-align="middle" fo:background-color="#ffffff" fo:padding-left="0.194cm" fo:padding-right="0.159cm" fo:padding-top="0.106cm" fo:padding-bottom="0.106cm" fo:border="0.35pt solid #b8c2cc">
        <style:background-image/>
      </style:table-cell-properties>
    </style:style>
    <style:style style:name="表格9.A3" style:family="table-cell">
      <style:table-cell-properties style:vertical-align="middle" fo:background-color="#f4f7fa" fo:padding-left="0.194cm" fo:padding-right="0.159cm" fo:padding-top="0.106cm" fo:padding-bottom="0.106cm" fo:border="0.35pt solid #b8c2cc">
        <style:background-image/>
      </style:table-cell-properties>
    </style:style>
    <style:style style:name="表格10" style:family="table">
      <style:table-properties style:width="17.18cm" fo:margin-left="0.056cm" fo:margin-top="0cm" fo:margin-bottom="0cm" table:align="left" style:writing-mode="page"/>
    </style:style>
    <style:style style:name="表格10.A" style:family="table-column">
      <style:table-column-properties style:column-width="17.18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8f1f9" fo:padding-left="0.3cm" fo:padding-right="0.247cm" fo:padding-top="0.159cm" fo:padding-bottom="0.159cm" fo:border-left="3.25pt solid #1f6fb2" fo:border-right="0.5pt solid #1f6fb2" fo:border-top="0.5pt solid #1f6fb2" fo:border-bottom="0.5pt solid #1f6fb2">
        <style:background-image/>
      </style:table-cell-properties>
    </style:style>
    <style:style style:name="表格11" style:family="table">
      <style:table-properties style:width="17.18cm" fo:margin-left="0.005cm" fo:margin-top="0cm" fo:margin-bottom="0cm" table:align="left" style:writing-mode="page"/>
    </style:style>
    <style:style style:name="表格11.A" style:family="table-column">
      <style:table-column-properties style:column-width="2.997cm"/>
    </style:style>
    <style:style style:name="表格11.B" style:family="table-column">
      <style:table-column-properties style:column-width="3.351cm"/>
    </style:style>
    <style:style style:name="表格11.C" style:family="table-column">
      <style:table-column-properties style:column-width="7.304cm"/>
    </style:style>
    <style:style style:name="表格11.D" style:family="table-column">
      <style:table-column-properties style:column-width="3.528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background-color="#1b3a5c" fo:padding-left="0.194cm" fo:padding-right="0.159cm" fo:padding-top="0.123cm" fo:padding-bottom="0.123cm" fo:border="0.35pt solid #b8c2cc">
        <style:background-image/>
      </style:table-cell-properties>
    </style:style>
    <style:style style:name="表格11.A2" style:family="table-cell">
      <style:table-cell-properties style:vertical-align="middle" fo:background-color="#ffffff" fo:padding-left="0.194cm" fo:padding-right="0.159cm" fo:padding-top="0.106cm" fo:padding-bottom="0.106cm" fo:border="0.35pt solid #b8c2cc">
        <style:background-image/>
      </style:table-cell-properties>
    </style:style>
    <style:style style:name="表格11.A3" style:family="table-cell">
      <style:table-cell-properties style:vertical-align="middle" fo:background-color="#f4f7fa" fo:padding-left="0.194cm" fo:padding-right="0.159cm" fo:padding-top="0.106cm" fo:padding-bottom="0.106cm" fo:border="0.35pt solid #b8c2cc">
        <style:background-image/>
      </style:table-cell-properties>
    </style:style>
    <style:style style:name="表格12" style:family="table">
      <style:table-properties style:width="17.18cm" fo:margin-left="0.056cm" fo:margin-top="0cm" fo:margin-bottom="0cm" table:align="left" style:writing-mode="page"/>
    </style:style>
    <style:style style:name="表格12.A" style:family="table-column">
      <style:table-column-properties style:column-width="17.18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2f3f5" fo:padding-left="0.3cm" fo:padding-right="0.247cm" fo:padding-top="0.159cm" fo:padding-bottom="0.159cm" fo:border-left="3.25pt solid #9aa4ad" fo:border-right="0.5pt solid #c9ced4" fo:border-top="0.5pt solid #c9ced4" fo:border-bottom="0.5pt solid #c9ced4">
        <style:background-image/>
      </style:table-cell-properties>
    </style:style>
    <style:style style:name="表格13" style:family="table">
      <style:table-properties style:width="17.18cm" fo:margin-left="0.056cm" fo:margin-top="0cm" fo:margin-bottom="0cm" table:align="left" style:writing-mode="page"/>
    </style:style>
    <style:style style:name="表格13.A" style:family="table-column">
      <style:table-column-properties style:column-width="17.18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e9f5ea" fo:padding-left="0.3cm" fo:padding-right="0.247cm" fo:padding-top="0.159cm" fo:padding-bottom="0.159cm" fo:border-left="3.25pt solid #2e7d32" fo:border-right="0.5pt solid #2e7d32" fo:border-top="0.5pt solid #2e7d32" fo:border-bottom="0.5pt solid #2e7d32">
        <style:background-image/>
      </style:table-cell-properties>
    </style:style>
    <style:style style:name="表格14" style:family="table">
      <style:table-properties style:width="17.18cm" fo:margin-left="0.005cm" fo:margin-top="0cm" fo:margin-bottom="0cm" table:align="left" style:writing-mode="page"/>
    </style:style>
    <style:style style:name="表格14.A" style:family="table-column">
      <style:table-column-properties style:column-width="3.616cm"/>
    </style:style>
    <style:style style:name="表格14.B" style:family="table-column">
      <style:table-column-properties style:column-width="7.391cm"/>
    </style:style>
    <style:style style:name="表格14.C" style:family="table-column">
      <style:table-column-properties style:column-width="6.174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b3a5c" fo:padding-left="0.194cm" fo:padding-right="0.159cm" fo:padding-top="0.123cm" fo:padding-bottom="0.123cm" fo:border="0.35pt solid #b8c2cc">
        <style:background-image/>
      </style:table-cell-properties>
    </style:style>
    <style:style style:name="表格14.A2" style:family="table-cell">
      <style:table-cell-properties style:vertical-align="middle" fo:background-color="#ffffff" fo:padding-left="0.194cm" fo:padding-right="0.159cm" fo:padding-top="0.106cm" fo:padding-bottom="0.106cm" fo:border="0.35pt solid #b8c2cc">
        <style:background-image/>
      </style:table-cell-properties>
    </style:style>
    <style:style style:name="表格14.A3" style:family="table-cell">
      <style:table-cell-properties style:vertical-align="middle" fo:background-color="#f4f7fa" fo:padding-left="0.194cm" fo:padding-right="0.159cm" fo:padding-top="0.106cm" fo:padding-bottom="0.106cm" fo:border="0.35pt solid #b8c2cc">
        <style:background-image/>
      </style:table-cell-properties>
    </style:style>
    <style:style style:name="表格15" style:family="table">
      <style:table-properties style:width="17.18cm" fo:margin-left="0.056cm" fo:margin-top="0cm" fo:margin-bottom="0cm" table:align="left" style:writing-mode="page"/>
    </style:style>
    <style:style style:name="表格15.A" style:family="table-column">
      <style:table-column-properties style:column-width="17.18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3f5" fo:padding-left="0.3cm" fo:padding-right="0.247cm" fo:padding-top="0.159cm" fo:padding-bottom="0.159cm" fo:border-left="3.25pt solid #9aa4ad" fo:border-right="0.5pt solid #c9ced4" fo:border-top="0.5pt solid #c9ced4" fo:border-bottom="0.5pt solid #c9ced4">
        <style:background-image/>
      </style:table-cell-properties>
    </style:style>
    <style:style style:name="表格16" style:family="table">
      <style:table-properties style:width="17.18cm" fo:margin-left="0.005cm" fo:margin-top="0cm" fo:margin-bottom="0cm" table:align="left" style:writing-mode="page"/>
    </style:style>
    <style:style style:name="表格16.A" style:family="table-column">
      <style:table-column-properties style:column-width="2.997cm"/>
    </style:style>
    <style:style style:name="表格16.B" style:family="table-column">
      <style:table-column-properties style:column-width="4.658cm"/>
    </style:style>
    <style:style style:name="表格16.C" style:family="table-column">
      <style:table-column-properties style:column-width="9.525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b3a5c" fo:padding-left="0.194cm" fo:padding-right="0.159cm" fo:padding-top="0.123cm" fo:padding-bottom="0.123cm" fo:border="0.35pt solid #b8c2cc">
        <style:background-image/>
      </style:table-cell-properties>
    </style:style>
    <style:style style:name="表格16.A2" style:family="table-cell">
      <style:table-cell-properties style:vertical-align="middle" fo:background-color="#ffffff" fo:padding-left="0.194cm" fo:padding-right="0.159cm" fo:padding-top="0.106cm" fo:padding-bottom="0.106cm" fo:border="0.35pt solid #b8c2cc">
        <style:background-image/>
      </style:table-cell-properties>
    </style:style>
    <style:style style:name="表格16.A3" style:family="table-cell">
      <style:table-cell-properties style:vertical-align="middle" fo:background-color="#f4f7fa" fo:padding-left="0.194cm" fo:padding-right="0.159cm" fo:padding-top="0.106cm" fo:padding-bottom="0.106cm" fo:border="0.35pt solid #b8c2cc">
        <style:background-image/>
      </style:table-cell-properties>
    </style:style>
    <style:style style:name="表格17" style:family="table">
      <style:table-properties style:width="17.18cm" fo:margin-left="0.056cm" fo:margin-top="0cm" fo:margin-bottom="0cm" table:align="left" style:writing-mode="page"/>
    </style:style>
    <style:style style:name="表格17.A" style:family="table-column">
      <style:table-column-properties style:column-width="17.18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9f5ea" fo:padding-left="0.3cm" fo:padding-right="0.247cm" fo:padding-top="0.159cm" fo:padding-bottom="0.159cm" fo:border-left="3.25pt solid #2e7d32" fo:border-right="0.5pt solid #2e7d32" fo:border-top="0.5pt solid #2e7d32" fo:border-bottom="0.5pt solid #2e7d32">
        <style:background-image/>
      </style:table-cell-properties>
    </style:style>
    <style:style style:name="表格18" style:family="table">
      <style:table-properties style:width="17.18cm" fo:margin-left="0.056cm" fo:margin-top="0cm" fo:margin-bottom="0cm" table:align="left" style:writing-mode="page"/>
    </style:style>
    <style:style style:name="表格18.A" style:family="table-column">
      <style:table-column-properties style:column-width="17.18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5" fo:padding-left="0.3cm" fo:padding-right="0.247cm" fo:padding-top="0.159cm" fo:padding-bottom="0.159cm" fo:border-left="3.25pt solid #9aa4ad" fo:border-right="0.5pt solid #c9ced4" fo:border-top="0.5pt solid #c9ced4" fo:border-bottom="0.5pt solid #c9ced4">
        <style:background-image/>
      </style:table-cell-properties>
    </style:style>
    <style:style style:name="表格18.A2" style:family="table-cell">
      <style:table-cell-properties fo:background-color="#e8f1f9" fo:padding-left="0.3cm" fo:padding-right="0.247cm" fo:padding-top="0.159cm" fo:padding-bottom="0.159cm" fo:border-left="3.25pt solid #1f6fb2" fo:border-right="0.5pt solid #1f6fb2" fo:border-top="0.5pt solid #1f6fb2" fo:border-bottom="0.5pt solid #1f6fb2">
        <style:background-image/>
      </style:table-cell-properties>
    </style:style>
    <style:style style:name="表格19" style:family="table">
      <style:table-properties style:width="17.18cm" fo:margin-left="0.056cm" fo:margin-top="0cm" fo:margin-bottom="0cm" table:align="left" style:writing-mode="page"/>
    </style:style>
    <style:style style:name="表格19.A" style:family="table-column">
      <style:table-column-properties style:column-width="17.18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2f3f5" fo:padding-left="0.3cm" fo:padding-right="0.247cm" fo:padding-top="0.159cm" fo:padding-bottom="0.159cm" fo:border-left="3.25pt solid #9aa4ad" fo:border-right="0.5pt solid #c9ced4" fo:border-top="0.5pt solid #c9ced4" fo:border-bottom="0.5pt solid #c9ced4">
        <style:background-image/>
      </style:table-cell-properties>
    </style:style>
    <style:style style:name="表格20" style:family="table">
      <style:table-properties style:width="17.18cm" fo:margin-left="0.056cm" fo:margin-top="0cm" fo:margin-bottom="0cm" table:align="left" style:writing-mode="page"/>
    </style:style>
    <style:style style:name="表格20.A" style:family="table-column">
      <style:table-column-properties style:column-width="17.18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ff6da" fo:padding-left="0.3cm" fo:padding-right="0.247cm" fo:padding-top="0.159cm" fo:padding-bottom="0.159cm" fo:border-left="3.25pt solid #c99400" fo:border-right="0.5pt solid #c99400" fo:border-top="0.5pt solid #c99400" fo:border-bottom="0.5pt solid #c99400">
        <style:background-image/>
      </style:table-cell-properties>
    </style:style>
    <style:style style:name="表格21" style:family="table">
      <style:table-properties style:width="17.18cm" fo:margin-left="0.005cm" fo:margin-top="0cm" fo:margin-bottom="0cm" table:align="left" style:writing-mode="page"/>
    </style:style>
    <style:style style:name="表格21.A" style:family="table-column">
      <style:table-column-properties style:column-width="5.713cm"/>
    </style:style>
    <style:style style:name="表格21.B" style:family="table-column">
      <style:table-column-properties style:column-width="5.733cm"/>
    </style:style>
    <style:style style:name="表格21.C" style:family="table-column">
      <style:table-column-properties style:column-width="5.734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b3a5c" fo:padding-left="0.194cm" fo:padding-right="0.159cm" fo:padding-top="0.123cm" fo:padding-bottom="0.123cm" fo:border="0.35pt solid #b8c2cc">
        <style:background-image/>
      </style:table-cell-properties>
    </style:style>
    <style:style style:name="表格21.A2" style:family="table-cell">
      <style:table-cell-properties style:vertical-align="middle" fo:background-color="#ffffff" fo:padding-left="0.194cm" fo:padding-right="0.159cm" fo:padding-top="0.106cm" fo:padding-bottom="0.106cm" fo:border="0.35pt solid #b8c2cc">
        <style:background-image/>
      </style:table-cell-properties>
    </style:style>
    <style:style style:name="表格21.A3" style:family="table-cell">
      <style:table-cell-properties style:vertical-align="middle" fo:background-color="#f4f7fa" fo:padding-left="0.194cm" fo:padding-right="0.159cm" fo:padding-top="0.106cm" fo:padding-bottom="0.106cm" fo:border="0.35pt solid #b8c2cc">
        <style:background-image/>
      </style:table-cell-properties>
    </style:style>
    <style:style style:name="表格22" style:family="table">
      <style:table-properties style:width="17.18cm" fo:margin-left="0.056cm" fo:margin-top="0cm" fo:margin-bottom="0cm" table:align="left" style:writing-mode="page"/>
    </style:style>
    <style:style style:name="表格22.A" style:family="table-column">
      <style:table-column-properties style:column-width="17.18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beae8" fo:padding-left="0.3cm" fo:padding-right="0.247cm" fo:padding-top="0.159cm" fo:padding-bottom="0.159cm" fo:border-left="3.25pt solid #c0392b" fo:border-right="0.5pt solid #c0392b" fo:border-top="0.5pt solid #c0392b" fo:border-bottom="0.5pt solid #c0392b">
        <style:background-image/>
      </style:table-cell-properties>
    </style:style>
    <style:style style:name="表格23" style:family="table">
      <style:table-properties style:width="17.18cm" fo:margin-left="0.056cm" fo:margin-top="0cm" fo:margin-bottom="0cm" table:align="left" style:writing-mode="page"/>
    </style:style>
    <style:style style:name="表格23.A" style:family="table-column">
      <style:table-column-properties style:column-width="17.18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ff6da" fo:padding-left="0.3cm" fo:padding-right="0.247cm" fo:padding-top="0.159cm" fo:padding-bottom="0.159cm" fo:border-left="3.25pt solid #c99400" fo:border-right="0.5pt solid #c99400" fo:border-top="0.5pt solid #c99400" fo:border-bottom="0.5pt solid #c99400">
        <style:background-image/>
      </style:table-cell-properties>
    </style:style>
    <style:style style:name="表格24" style:family="table">
      <style:table-properties style:width="17.18cm" fo:margin-left="0.005cm" fo:margin-top="0cm" fo:margin-bottom="0cm" table:align="left" style:writing-mode="page"/>
    </style:style>
    <style:style style:name="表格24.A" style:family="table-column">
      <style:table-column-properties style:column-width="2.644cm"/>
    </style:style>
    <style:style style:name="表格24.B" style:family="table-column">
      <style:table-column-properties style:column-width="5.891cm"/>
    </style:style>
    <style:style style:name="表格24.C" style:family="table-column">
      <style:table-column-properties style:column-width="4.763cm"/>
    </style:style>
    <style:style style:name="表格24.D" style:family="table-column">
      <style:table-column-properties style:column-width="3.882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b3a5c" fo:padding-left="0.194cm" fo:padding-right="0.159cm" fo:padding-top="0.123cm" fo:padding-bottom="0.123cm" fo:border="0.35pt solid #b8c2cc">
        <style:background-image/>
      </style:table-cell-properties>
    </style:style>
    <style:style style:name="表格24.A2" style:family="table-cell">
      <style:table-cell-properties style:vertical-align="middle" fo:background-color="#ffffff" fo:padding-left="0.194cm" fo:padding-right="0.159cm" fo:padding-top="0.106cm" fo:padding-bottom="0.106cm" fo:border="0.35pt solid #b8c2cc">
        <style:background-image/>
      </style:table-cell-properties>
    </style:style>
    <style:style style:name="表格24.A3" style:family="table-cell">
      <style:table-cell-properties style:vertical-align="middle" fo:background-color="#f4f7fa" fo:padding-left="0.194cm" fo:padding-right="0.159cm" fo:padding-top="0.106cm" fo:padding-bottom="0.106cm" fo:border="0.35pt solid #b8c2cc">
        <style:background-image/>
      </style:table-cell-properties>
    </style:style>
    <style:style style:name="表格25" style:family="table">
      <style:table-properties style:width="17.18cm" fo:margin-left="0.056cm" fo:margin-top="0cm" fo:margin-bottom="0cm" table:align="left" style:writing-mode="page"/>
    </style:style>
    <style:style style:name="表格25.A" style:family="table-column">
      <style:table-column-properties style:column-width="17.18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e9f5ea" fo:padding-left="0.3cm" fo:padding-right="0.247cm" fo:padding-top="0.159cm" fo:padding-bottom="0.159cm" fo:border-left="3.25pt solid #2e7d32" fo:border-right="0.5pt solid #2e7d32" fo:border-top="0.5pt solid #2e7d32" fo:border-bottom="0.5pt solid #2e7d32">
        <style:background-image/>
      </style:table-cell-properties>
    </style:style>
    <style:style style:name="表格26" style:family="table">
      <style:table-properties style:width="17.18cm" fo:margin-left="0.056cm" fo:margin-top="0cm" fo:margin-bottom="0cm" table:align="left" style:writing-mode="page"/>
    </style:style>
    <style:style style:name="表格26.A" style:family="table-column">
      <style:table-column-properties style:column-width="17.18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8f1f9" fo:padding-left="0.3cm" fo:padding-right="0.247cm" fo:padding-top="0.159cm" fo:padding-bottom="0.159cm" fo:border-left="3.25pt solid #1f6fb2" fo:border-right="0.5pt solid #1f6fb2" fo:border-top="0.5pt solid #1f6fb2" fo:border-bottom="0.5pt solid #1f6fb2">
        <style:background-image/>
      </style:table-cell-properties>
    </style:style>
    <style:style style:name="表格27" style:family="table">
      <style:table-properties style:width="17.18cm" fo:margin-left="0.056cm" fo:margin-top="0cm" fo:margin-bottom="0cm" table:align="left" style:writing-mode="page"/>
    </style:style>
    <style:style style:name="表格27.A" style:family="table-column">
      <style:table-column-properties style:column-width="17.18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5" fo:padding-left="0.3cm" fo:padding-right="0.247cm" fo:padding-top="0.159cm" fo:padding-bottom="0.159cm" fo:border-left="3.25pt solid #9aa4ad" fo:border-right="0.5pt solid #c9ced4" fo:border-top="0.5pt solid #c9ced4" fo:border-bottom="0.5pt solid #c9ced4">
        <style:background-image/>
      </style:table-cell-properties>
    </style:style>
    <style:style style:name="表格28" style:family="table">
      <style:table-properties style:width="17.18cm" fo:margin-left="0.056cm" fo:margin-top="0cm" fo:margin-bottom="0cm" table:align="left" style:writing-mode="page"/>
    </style:style>
    <style:style style:name="表格28.A" style:family="table-column">
      <style:table-column-properties style:column-width="17.18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3f5" fo:padding-left="0.3cm" fo:padding-right="0.247cm" fo:padding-top="0.159cm" fo:padding-bottom="0.159cm" fo:border-left="3.25pt solid #9aa4ad" fo:border-right="0.5pt solid #c9ced4" fo:border-top="0.5pt solid #c9ced4" fo:border-bottom="0.5pt solid #c9ced4">
        <style:background-image/>
      </style:table-cell-properties>
    </style:style>
    <style:style style:name="表格29" style:family="table">
      <style:table-properties style:width="17.18cm" fo:margin-left="0.056cm" fo:margin-top="0cm" fo:margin-bottom="0cm" table:align="left" style:writing-mode="page"/>
    </style:style>
    <style:style style:name="表格29.A" style:family="table-column">
      <style:table-column-properties style:column-width="17.18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2f3f5" fo:padding-left="0.3cm" fo:padding-right="0.247cm" fo:padding-top="0.159cm" fo:padding-bottom="0.159cm" fo:border-left="3.25pt solid #9aa4ad" fo:border-right="0.5pt solid #c9ced4" fo:border-top="0.5pt solid #c9ced4" fo:border-bottom="0.5pt solid #c9ced4">
        <style:background-image/>
      </style:table-cell-properties>
    </style:style>
    <style:style style:name="表格30" style:family="table">
      <style:table-properties style:width="17.18cm" fo:margin-left="0.056cm" fo:margin-top="0cm" fo:margin-bottom="0cm" table:align="left" style:writing-mode="page"/>
    </style:style>
    <style:style style:name="表格30.A" style:family="table-column">
      <style:table-column-properties style:column-width="17.18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ff6da" fo:padding-left="0.3cm" fo:padding-right="0.247cm" fo:padding-top="0.159cm" fo:padding-bottom="0.159cm" fo:border-left="3.25pt solid #c99400" fo:border-right="0.5pt solid #c99400" fo:border-top="0.5pt solid #c99400" fo:border-bottom="0.5pt solid #c99400">
        <style:background-image/>
      </style:table-cell-properties>
    </style:style>
    <style:style style:name="表格31" style:family="table">
      <style:table-properties style:width="17.18cm" fo:margin-left="0.005cm" fo:margin-top="0cm" fo:margin-bottom="0cm" table:align="left" style:writing-mode="page"/>
    </style:style>
    <style:style style:name="表格31.A" style:family="table-column">
      <style:table-column-properties style:column-width="4.655cm"/>
    </style:style>
    <style:style style:name="表格31.B" style:family="table-column">
      <style:table-column-properties style:column-width="4.41cm"/>
    </style:style>
    <style:style style:name="表格31.C" style:family="table-column">
      <style:table-column-properties style:column-width="8.116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b3a5c" fo:padding-left="0.194cm" fo:padding-right="0.159cm" fo:padding-top="0.123cm" fo:padding-bottom="0.123cm" fo:border="0.35pt solid #b8c2cc">
        <style:background-image/>
      </style:table-cell-properties>
    </style:style>
    <style:style style:name="表格31.A2" style:family="table-cell">
      <style:table-cell-properties style:vertical-align="middle" fo:background-color="#ffffff" fo:padding-left="0.194cm" fo:padding-right="0.159cm" fo:padding-top="0.106cm" fo:padding-bottom="0.106cm" fo:border="0.35pt solid #b8c2cc">
        <style:background-image/>
      </style:table-cell-properties>
    </style:style>
    <style:style style:name="表格31.A3" style:family="table-cell">
      <style:table-cell-properties style:vertical-align="middle" fo:background-color="#f4f7fa" fo:padding-left="0.194cm" fo:padding-right="0.159cm" fo:padding-top="0.106cm" fo:padding-bottom="0.106cm" fo:border="0.35pt solid #b8c2cc">
        <style:background-image/>
      </style:table-cell-properties>
    </style:style>
    <style:style style:name="表格32" style:family="table">
      <style:table-properties style:width="17.18cm" fo:margin-left="0.056cm" fo:margin-top="0cm" fo:margin-bottom="0cm" table:align="left" style:writing-mode="page"/>
    </style:style>
    <style:style style:name="表格32.A" style:family="table-column">
      <style:table-column-properties style:column-width="17.18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2f3f5" fo:padding-left="0.3cm" fo:padding-right="0.247cm" fo:padding-top="0.159cm" fo:padding-bottom="0.159cm" fo:border-left="3.25pt solid #9aa4ad" fo:border-right="0.5pt solid #c9ced4" fo:border-top="0.5pt solid #c9ced4" fo:border-bottom="0.5pt solid #c9ced4">
        <style:background-image/>
      </style:table-cell-properties>
    </style:style>
    <style:style style:name="表格33" style:family="table">
      <style:table-properties style:width="17.18cm" fo:margin-left="0.056cm" fo:margin-top="0cm" fo:margin-bottom="0cm" table:align="left" style:writing-mode="page"/>
    </style:style>
    <style:style style:name="表格33.A" style:family="table-column">
      <style:table-column-properties style:column-width="17.18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2f3f5" fo:padding-left="0.3cm" fo:padding-right="0.247cm" fo:padding-top="0.159cm" fo:padding-bottom="0.159cm" fo:border-left="3.25pt solid #9aa4ad" fo:border-right="0.5pt solid #c9ced4" fo:border-top="0.5pt solid #c9ced4" fo:border-bottom="0.5pt solid #c9ced4">
        <style:background-image/>
      </style:table-cell-properties>
    </style:style>
    <style:style style:name="表格34" style:family="table">
      <style:table-properties style:width="17.18cm" fo:margin-left="0.056cm" fo:margin-top="0cm" fo:margin-bottom="0cm" table:align="left" style:writing-mode="page"/>
    </style:style>
    <style:style style:name="表格34.A" style:family="table-column">
      <style:table-column-properties style:column-width="17.18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2f3f5" fo:padding-left="0.3cm" fo:padding-right="0.247cm" fo:padding-top="0.159cm" fo:padding-bottom="0.159cm" fo:border-left="3.25pt solid #9aa4ad" fo:border-right="0.5pt solid #c9ced4" fo:border-top="0.5pt solid #c9ced4" fo:border-bottom="0.5pt solid #c9ced4">
        <style:background-image/>
      </style:table-cell-properties>
    </style:style>
    <style:style style:name="表格35" style:family="table">
      <style:table-properties style:width="17.18cm" fo:margin-left="0.056cm" fo:margin-top="0cm" fo:margin-bottom="0cm" table:align="left" style:writing-mode="page"/>
    </style:style>
    <style:style style:name="表格35.A" style:family="table-column">
      <style:table-column-properties style:column-width="17.18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3f5" fo:padding-left="0.3cm" fo:padding-right="0.247cm" fo:padding-top="0.159cm" fo:padding-bottom="0.159cm" fo:border-left="3.25pt solid #9aa4ad" fo:border-right="0.5pt solid #c9ced4" fo:border-top="0.5pt solid #c9ced4" fo:border-bottom="0.5pt solid #c9ced4">
        <style:background-image/>
      </style:table-cell-properties>
    </style:style>
    <style:style style:name="表格36" style:family="table">
      <style:table-properties style:width="17.18cm" fo:margin-left="0.056cm" fo:margin-top="0cm" fo:margin-bottom="0cm" table:align="left" style:writing-mode="page"/>
    </style:style>
    <style:style style:name="表格36.A" style:family="table-column">
      <style:table-column-properties style:column-width="17.18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beae8" fo:padding-left="0.3cm" fo:padding-right="0.247cm" fo:padding-top="0.159cm" fo:padding-bottom="0.159cm" fo:border-left="3.25pt solid #c0392b" fo:border-right="0.5pt solid #c0392b" fo:border-top="0.5pt solid #c0392b" fo:border-bottom="0.5pt solid #c0392b">
        <style:background-image/>
      </style:table-cell-properties>
    </style:style>
    <style:style style:name="表格37" style:family="table">
      <style:table-properties style:width="17.18cm" fo:margin-left="0.056cm" fo:margin-top="0cm" fo:margin-bottom="0cm" table:align="left" style:writing-mode="page"/>
    </style:style>
    <style:style style:name="表格37.A" style:family="table-column">
      <style:table-column-properties style:column-width="17.18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e8f1f9" fo:padding-left="0.3cm" fo:padding-right="0.247cm" fo:padding-top="0.159cm" fo:padding-bottom="0.159cm" fo:border-left="3.25pt solid #1f6fb2" fo:border-right="0.5pt solid #1f6fb2" fo:border-top="0.5pt solid #1f6fb2" fo:border-bottom="0.5pt solid #1f6fb2">
        <style:background-image/>
      </style:table-cell-properties>
    </style:style>
    <style:style style:name="表格38" style:family="table">
      <style:table-properties style:width="17.18cm" fo:margin-left="0.005cm" fo:margin-top="0cm" fo:margin-bottom="0cm" table:align="left" style:writing-mode="page"/>
    </style:style>
    <style:style style:name="表格38.A" style:family="table-column">
      <style:table-column-properties style:column-width="2.293cm"/>
    </style:style>
    <style:style style:name="表格38.B" style:family="table-column">
      <style:table-column-properties style:column-width="8.888cm"/>
    </style:style>
    <style:style style:name="表格38.C" style:family="table-column">
      <style:table-column-properties style:column-width="5.999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b3a5c" fo:padding-left="0.194cm" fo:padding-right="0.159cm" fo:padding-top="0.123cm" fo:padding-bottom="0.123cm" fo:border="0.35pt solid #b8c2cc">
        <style:background-image/>
      </style:table-cell-properties>
    </style:style>
    <style:style style:name="表格38.A2" style:family="table-cell">
      <style:table-cell-properties style:vertical-align="middle" fo:background-color="#ffffff" fo:padding-left="0.194cm" fo:padding-right="0.159cm" fo:padding-top="0.106cm" fo:padding-bottom="0.106cm" fo:border="0.35pt solid #b8c2cc">
        <style:background-image/>
      </style:table-cell-properties>
    </style:style>
    <style:style style:name="表格38.A3" style:family="table-cell">
      <style:table-cell-properties style:vertical-align="middle" fo:background-color="#f4f7fa" fo:padding-left="0.194cm" fo:padding-right="0.159cm" fo:padding-top="0.106cm" fo:padding-bottom="0.106cm" fo:border="0.35pt solid #b8c2cc">
        <style:background-image/>
      </style:table-cell-properties>
    </style:style>
    <style:style style:name="表格39" style:family="table">
      <style:table-properties style:width="17.18cm" fo:margin-left="0.056cm" fo:margin-top="0cm" fo:margin-bottom="0cm" table:align="left" style:writing-mode="page"/>
    </style:style>
    <style:style style:name="表格39.A" style:family="table-column">
      <style:table-column-properties style:column-width="17.18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9f5ea" fo:padding-left="0.3cm" fo:padding-right="0.247cm" fo:padding-top="0.159cm" fo:padding-bottom="0.159cm" fo:border-left="3.25pt solid #2e7d32" fo:border-right="0.5pt solid #2e7d32" fo:border-top="0.5pt solid #2e7d32" fo:border-bottom="0.5pt solid #2e7d32">
        <style:background-image/>
      </style:table-cell-properties>
    </style:style>
    <style:style style:name="表格40" style:family="table">
      <style:table-properties style:width="17.18cm" fo:margin-left="0.005cm" fo:margin-top="0cm" fo:margin-bottom="0cm" table:align="left" style:writing-mode="page"/>
    </style:style>
    <style:style style:name="表格40.A" style:family="table-column">
      <style:table-column-properties style:column-width="3.351cm"/>
    </style:style>
    <style:style style:name="表格40.B" style:family="table-column">
      <style:table-column-properties style:column-width="3.879cm"/>
    </style:style>
    <style:style style:name="表格40.C" style:family="table-column">
      <style:table-column-properties style:column-width="5.539cm"/>
    </style:style>
    <style:style style:name="表格40.D" style:family="table-column">
      <style:table-column-properties style:column-width="4.411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b3a5c" fo:padding-left="0.194cm" fo:padding-right="0.159cm" fo:padding-top="0.123cm" fo:padding-bottom="0.123cm" fo:border="0.35pt solid #b8c2cc">
        <style:background-image/>
      </style:table-cell-properties>
    </style:style>
    <style:style style:name="表格40.A2" style:family="table-cell">
      <style:table-cell-properties style:vertical-align="middle" fo:background-color="#ffffff" fo:padding-left="0.194cm" fo:padding-right="0.159cm" fo:padding-top="0.106cm" fo:padding-bottom="0.106cm" fo:border="0.35pt solid #b8c2cc">
        <style:background-image/>
      </style:table-cell-properties>
    </style:style>
    <style:style style:name="表格40.A3" style:family="table-cell">
      <style:table-cell-properties style:vertical-align="middle" fo:background-color="#f4f7fa" fo:padding-left="0.194cm" fo:padding-right="0.159cm" fo:padding-top="0.106cm" fo:padding-bottom="0.106cm" fo:border="0.35pt solid #b8c2cc">
        <style:background-image/>
      </style:table-cell-properties>
    </style:style>
    <style:style style:name="表格41" style:family="table">
      <style:table-properties style:width="17.18cm" fo:margin-left="0.056cm" fo:margin-top="0cm" fo:margin-bottom="0cm" table:align="left" style:writing-mode="page"/>
    </style:style>
    <style:style style:name="表格41.A" style:family="table-column">
      <style:table-column-properties style:column-width="17.18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5" fo:padding-left="0.3cm" fo:padding-right="0.247cm" fo:padding-top="0.159cm" fo:padding-bottom="0.159cm" fo:border-left="3.25pt solid #9aa4ad" fo:border-right="0.5pt solid #c9ced4" fo:border-top="0.5pt solid #c9ced4" fo:border-bottom="0.5pt solid #c9ced4">
        <style:background-image/>
      </style:table-cell-properties>
    </style:style>
    <style:style style:name="表格42" style:family="table">
      <style:table-properties style:width="17.18cm" fo:margin-left="0.056cm" fo:margin-top="0cm" fo:margin-bottom="0cm" table:align="left" style:writing-mode="page"/>
    </style:style>
    <style:style style:name="表格42.A" style:family="table-column">
      <style:table-column-properties style:column-width="17.18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ff6da" fo:padding-left="0.3cm" fo:padding-right="0.247cm" fo:padding-top="0.159cm" fo:padding-bottom="0.159cm" fo:border-left="3.25pt solid #c99400" fo:border-right="0.5pt solid #c99400" fo:border-top="0.5pt solid #c99400" fo:border-bottom="0.5pt solid #c99400">
        <style:background-image/>
      </style:table-cell-properties>
    </style:style>
    <style:style style:name="表格43" style:family="table">
      <style:table-properties style:width="17.18cm" fo:margin-left="0.056cm" fo:margin-top="0cm" fo:margin-bottom="0cm" table:align="left" style:writing-mode="page"/>
    </style:style>
    <style:style style:name="表格43.A" style:family="table-column">
      <style:table-column-properties style:column-width="17.18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2f3f5" fo:padding-left="0.3cm" fo:padding-right="0.247cm" fo:padding-top="0.159cm" fo:padding-bottom="0.159cm" fo:border-left="3.25pt solid #9aa4ad" fo:border-right="0.5pt solid #c9ced4" fo:border-top="0.5pt solid #c9ced4" fo:border-bottom="0.5pt solid #c9ced4">
        <style:background-image/>
      </style:table-cell-properties>
    </style:style>
    <style:style style:name="表格44" style:family="table">
      <style:table-properties style:width="17.18cm" fo:margin-left="0.056cm" fo:margin-top="0cm" fo:margin-bottom="0cm" table:align="left" style:writing-mode="page"/>
    </style:style>
    <style:style style:name="表格44.A" style:family="table-column">
      <style:table-column-properties style:column-width="17.18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2f3f5" fo:padding-left="0.3cm" fo:padding-right="0.247cm" fo:padding-top="0.159cm" fo:padding-bottom="0.159cm" fo:border-left="3.25pt solid #9aa4ad" fo:border-right="0.5pt solid #c9ced4" fo:border-top="0.5pt solid #c9ced4" fo:border-bottom="0.5pt solid #c9ced4">
        <style:background-image/>
      </style:table-cell-properties>
    </style:style>
    <style:style style:name="表格45" style:family="table">
      <style:table-properties style:width="17.18cm" fo:margin-left="0.056cm" fo:margin-top="0cm" fo:margin-bottom="0cm" table:align="left" style:writing-mode="page"/>
    </style:style>
    <style:style style:name="表格45.A" style:family="table-column">
      <style:table-column-properties style:column-width="17.18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e8f1f9" fo:padding-left="0.3cm" fo:padding-right="0.247cm" fo:padding-top="0.159cm" fo:padding-bottom="0.159cm" fo:border-left="3.25pt solid #1f6fb2" fo:border-right="0.5pt solid #1f6fb2" fo:border-top="0.5pt solid #1f6fb2" fo:border-bottom="0.5pt solid #1f6fb2">
        <style:background-image/>
      </style:table-cell-properties>
    </style:style>
    <style:style style:name="表格46" style:family="table">
      <style:table-properties style:width="17.18cm" fo:margin-left="0.056cm" fo:margin-top="0cm" fo:margin-bottom="0cm" table:align="left" style:writing-mode="page"/>
    </style:style>
    <style:style style:name="表格46.A" style:family="table-column">
      <style:table-column-properties style:column-width="17.1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2f3f5" fo:padding-left="0.3cm" fo:padding-right="0.247cm" fo:padding-top="0.159cm" fo:padding-bottom="0.159cm" fo:border-left="3.25pt solid #9aa4ad" fo:border-right="0.5pt solid #c9ced4" fo:border-top="0.5pt solid #c9ced4" fo:border-bottom="0.5pt solid #c9ced4">
        <style:background-image/>
      </style:table-cell-properties>
    </style:style>
    <style:style style:name="表格47" style:family="table">
      <style:table-properties style:width="17.18cm" fo:margin-left="0.056cm" fo:margin-top="0cm" fo:margin-bottom="0cm" table:align="left" style:writing-mode="page"/>
    </style:style>
    <style:style style:name="表格47.A" style:family="table-column">
      <style:table-column-properties style:column-width="17.18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f2f3f5" fo:padding-left="0.3cm" fo:padding-right="0.247cm" fo:padding-top="0.159cm" fo:padding-bottom="0.159cm" fo:border-left="3.25pt solid #9aa4ad" fo:border-right="0.5pt solid #c9ced4" fo:border-top="0.5pt solid #c9ced4" fo:border-bottom="0.5pt solid #c9ced4">
        <style:background-image/>
      </style:table-cell-properties>
    </style:style>
    <style:style style:name="表格48" style:family="table">
      <style:table-properties style:width="17.18cm" fo:margin-left="0.056cm" fo:margin-top="0cm" fo:margin-bottom="0cm" table:align="left" style:writing-mode="page"/>
    </style:style>
    <style:style style:name="表格48.A" style:family="table-column">
      <style:table-column-properties style:column-width="17.18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e8f1f9" fo:padding-left="0.3cm" fo:padding-right="0.247cm" fo:padding-top="0.159cm" fo:padding-bottom="0.159cm" fo:border-left="3.25pt solid #1f6fb2" fo:border-right="0.5pt solid #1f6fb2" fo:border-top="0.5pt solid #1f6fb2" fo:border-bottom="0.5pt solid #1f6fb2">
        <style:background-image/>
      </style:table-cell-properties>
    </style:style>
    <style:style style:name="表格49" style:family="table">
      <style:table-properties style:width="17.18cm" fo:margin-left="0.056cm" fo:margin-top="0cm" fo:margin-bottom="0cm" table:align="left" style:writing-mode="page"/>
    </style:style>
    <style:style style:name="表格49.A" style:family="table-column">
      <style:table-column-properties style:column-width="17.18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9f5ea" fo:padding-left="0.3cm" fo:padding-right="0.247cm" fo:padding-top="0.159cm" fo:padding-bottom="0.159cm" fo:border-left="3.25pt solid #2e7d32" fo:border-right="0.5pt solid #2e7d32" fo:border-top="0.5pt solid #2e7d32" fo:border-bottom="0.5pt solid #2e7d32">
        <style:background-image/>
      </style:table-cell-properties>
    </style:style>
    <style:style style:name="表格50" style:family="table">
      <style:table-properties style:width="17.18cm" fo:margin-left="0.056cm" fo:margin-top="0cm" fo:margin-bottom="0cm" table:align="left" style:writing-mode="page"/>
    </style:style>
    <style:style style:name="表格50.A" style:family="table-column">
      <style:table-column-properties style:column-width="17.18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3f5" fo:padding-left="0.3cm" fo:padding-right="0.247cm" fo:padding-top="0.159cm" fo:padding-bottom="0.159cm" fo:border-left="3.25pt solid #9aa4ad" fo:border-right="0.5pt solid #c9ced4" fo:border-top="0.5pt solid #c9ced4" fo:border-bottom="0.5pt solid #c9ced4">
        <style:background-image/>
      </style:table-cell-properties>
    </style:style>
    <style:style style:name="表格51" style:family="table">
      <style:table-properties style:width="17.18cm" fo:margin-left="0.056cm" fo:margin-top="0cm" fo:margin-bottom="0cm" table:align="left" style:writing-mode="page"/>
    </style:style>
    <style:style style:name="表格51.A" style:family="table-column">
      <style:table-column-properties style:column-width="17.18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2f3f5" fo:padding-left="0.3cm" fo:padding-right="0.247cm" fo:padding-top="0.159cm" fo:padding-bottom="0.159cm" fo:border-left="3.25pt solid #9aa4ad" fo:border-right="0.5pt solid #c9ced4" fo:border-top="0.5pt solid #c9ced4" fo:border-bottom="0.5pt solid #c9ced4">
        <style:background-image/>
      </style:table-cell-properties>
    </style:style>
    <style:style style:name="表格52" style:family="table">
      <style:table-properties style:width="17.18cm" fo:margin-left="0.056cm" fo:margin-top="0cm" fo:margin-bottom="0cm" table:align="left" style:writing-mode="page"/>
    </style:style>
    <style:style style:name="表格52.A" style:family="table-column">
      <style:table-column-properties style:column-width="17.18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e9f5ea" fo:padding-left="0.3cm" fo:padding-right="0.247cm" fo:padding-top="0.159cm" fo:padding-bottom="0.159cm" fo:border-left="3.25pt solid #2e7d32" fo:border-right="0.5pt solid #2e7d32" fo:border-top="0.5pt solid #2e7d32" fo:border-bottom="0.5pt solid #2e7d32">
        <style:background-image/>
      </style:table-cell-properties>
    </style:style>
    <style:style style:name="表格53" style:family="table">
      <style:table-properties style:width="17.18cm" fo:margin-left="0.056cm" fo:margin-top="0cm" fo:margin-bottom="0cm" table:align="left" style:writing-mode="page"/>
    </style:style>
    <style:style style:name="表格53.A" style:family="table-column">
      <style:table-column-properties style:column-width="17.18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2f3f5" fo:padding-left="0.3cm" fo:padding-right="0.247cm" fo:padding-top="0.159cm" fo:padding-bottom="0.159cm" fo:border-left="3.25pt solid #9aa4ad" fo:border-right="0.5pt solid #c9ced4" fo:border-top="0.5pt solid #c9ced4" fo:border-bottom="0.5pt solid #c9ced4">
        <style:background-image/>
      </style:table-cell-properties>
    </style:style>
    <style:style style:name="表格54" style:family="table">
      <style:table-properties style:width="17.18cm" fo:margin-left="0.056cm" fo:margin-top="0cm" fo:margin-bottom="0cm" table:align="left" style:writing-mode="page"/>
    </style:style>
    <style:style style:name="表格54.A" style:family="table-column">
      <style:table-column-properties style:column-width="17.18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f2f3f5" fo:padding-left="0.3cm" fo:padding-right="0.247cm" fo:padding-top="0.159cm" fo:padding-bottom="0.159cm" fo:border-left="3.25pt solid #9aa4ad" fo:border-right="0.5pt solid #c9ced4" fo:border-top="0.5pt solid #c9ced4" fo:border-bottom="0.5pt solid #c9ced4">
        <style:background-image/>
      </style:table-cell-properties>
    </style:style>
    <style:style style:name="表格55" style:family="table">
      <style:table-properties style:width="17.18cm" fo:margin-left="0.056cm" fo:margin-top="0cm" fo:margin-bottom="0cm" table:align="left" style:writing-mode="page"/>
    </style:style>
    <style:style style:name="表格55.A" style:family="table-column">
      <style:table-column-properties style:column-width="17.18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e9f5ea" fo:padding-left="0.3cm" fo:padding-right="0.247cm" fo:padding-top="0.159cm" fo:padding-bottom="0.159cm" fo:border-left="3.25pt solid #2e7d32" fo:border-right="0.5pt solid #2e7d32" fo:border-top="0.5pt solid #2e7d32" fo:border-bottom="0.5pt solid #2e7d32">
        <style:background-image/>
      </style:table-cell-properties>
    </style:style>
    <style:style style:name="表格56" style:family="table">
      <style:table-properties style:width="17.18cm" fo:margin-left="0.005cm" fo:margin-top="0cm" fo:margin-bottom="0cm" table:align="left" style:writing-mode="page"/>
    </style:style>
    <style:style style:name="表格56.A" style:family="table-column">
      <style:table-column-properties style:column-width="4.055cm"/>
    </style:style>
    <style:style style:name="表格56.B" style:family="table-column">
      <style:table-column-properties style:column-width="5.117cm"/>
    </style:style>
    <style:style style:name="表格56.C" style:family="table-column">
      <style:table-column-properties style:column-width="3.951cm"/>
    </style:style>
    <style:style style:name="表格56.D" style:family="table-column">
      <style:table-column-properties style:column-width="4.057cm"/>
    </style:style>
    <style:style style:name="表格56.1" style:family="table-row">
      <style:table-row-properties fo:keep-together="auto"/>
    </style:style>
    <style:style style:name="表格56.A1" style:family="table-cell">
      <style:table-cell-properties style:vertical-align="middle" fo:background-color="#1b3a5c" fo:padding-left="0.194cm" fo:padding-right="0.159cm" fo:padding-top="0.123cm" fo:padding-bottom="0.123cm" fo:border="0.35pt solid #b8c2cc">
        <style:background-image/>
      </style:table-cell-properties>
    </style:style>
    <style:style style:name="表格56.A2" style:family="table-cell">
      <style:table-cell-properties style:vertical-align="middle" fo:background-color="#ffffff" fo:padding-left="0.194cm" fo:padding-right="0.159cm" fo:padding-top="0.106cm" fo:padding-bottom="0.106cm" fo:border="0.35pt solid #b8c2cc">
        <style:background-image/>
      </style:table-cell-properties>
    </style:style>
    <style:style style:name="表格56.A3" style:family="table-cell">
      <style:table-cell-properties style:vertical-align="middle" fo:background-color="#f4f7fa" fo:padding-left="0.194cm" fo:padding-right="0.159cm" fo:padding-top="0.106cm" fo:padding-bottom="0.106cm" fo:border="0.35pt solid #b8c2cc">
        <style:background-image/>
      </style:table-cell-properties>
    </style:style>
    <style:style style:name="表格57" style:family="table">
      <style:table-properties style:width="17.18cm" fo:margin-left="0.056cm" fo:margin-top="0cm" fo:margin-bottom="0cm" table:align="left" style:writing-mode="page"/>
    </style:style>
    <style:style style:name="表格57.A" style:family="table-column">
      <style:table-column-properties style:column-width="17.18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ff6da" fo:padding-left="0.3cm" fo:padding-right="0.247cm" fo:padding-top="0.159cm" fo:padding-bottom="0.159cm" fo:border-left="3.25pt solid #c99400" fo:border-right="0.5pt solid #c99400" fo:border-top="0.5pt solid #c99400" fo:border-bottom="0.5pt solid #c99400">
        <style:background-image/>
      </style:table-cell-properties>
    </style:style>
    <style:style style:name="表格58" style:family="table">
      <style:table-properties style:width="17.18cm" fo:margin-left="0.056cm" fo:margin-top="0cm" fo:margin-bottom="0cm" table:align="left" style:writing-mode="page"/>
    </style:style>
    <style:style style:name="表格58.A" style:family="table-column">
      <style:table-column-properties style:column-width="17.18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e8f1f9" fo:padding-left="0.3cm" fo:padding-right="0.247cm" fo:padding-top="0.159cm" fo:padding-bottom="0.159cm" fo:border-left="3.25pt solid #1f6fb2" fo:border-right="0.5pt solid #1f6fb2" fo:border-top="0.5pt solid #1f6fb2" fo:border-bottom="0.5pt solid #1f6fb2">
        <style:background-image/>
      </style:table-cell-properties>
    </style:style>
    <style:style style:name="表格59" style:family="table">
      <style:table-properties style:width="17.18cm" fo:margin-left="0.056cm" fo:margin-top="0cm" fo:margin-bottom="0cm" table:align="left" style:writing-mode="page"/>
    </style:style>
    <style:style style:name="表格59.A" style:family="table-column">
      <style:table-column-properties style:column-width="17.18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f2f3f5" fo:padding-left="0.3cm" fo:padding-right="0.247cm" fo:padding-top="0.159cm" fo:padding-bottom="0.159cm" fo:border-left="3.25pt solid #9aa4ad" fo:border-right="0.5pt solid #c9ced4" fo:border-top="0.5pt solid #c9ced4" fo:border-bottom="0.5pt solid #c9ced4">
        <style:background-image/>
      </style:table-cell-properties>
    </style:style>
    <style:style style:name="表格60" style:family="table">
      <style:table-properties style:width="17.18cm" fo:margin-left="0.005cm" fo:margin-top="0cm" fo:margin-bottom="0cm" table:align="left" style:writing-mode="page"/>
    </style:style>
    <style:style style:name="表格60.A" style:family="table-column">
      <style:table-column-properties style:column-width="4.055cm"/>
    </style:style>
    <style:style style:name="表格60.B" style:family="table-column">
      <style:table-column-properties style:column-width="6.422cm"/>
    </style:style>
    <style:style style:name="表格60.C" style:family="table-column">
      <style:table-column-properties style:column-width="6.703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middle" fo:background-color="#1b3a5c" fo:padding-left="0.194cm" fo:padding-right="0.159cm" fo:padding-top="0.123cm" fo:padding-bottom="0.123cm" fo:border="0.35pt solid #b8c2cc">
        <style:background-image/>
      </style:table-cell-properties>
    </style:style>
    <style:style style:name="表格60.A2" style:family="table-cell">
      <style:table-cell-properties style:vertical-align="middle" fo:background-color="#ffffff" fo:padding-left="0.194cm" fo:padding-right="0.159cm" fo:padding-top="0.106cm" fo:padding-bottom="0.106cm" fo:border="0.35pt solid #b8c2cc">
        <style:background-image/>
      </style:table-cell-properties>
    </style:style>
    <style:style style:name="表格60.A3" style:family="table-cell">
      <style:table-cell-properties style:vertical-align="middle" fo:background-color="#f4f7fa" fo:padding-left="0.194cm" fo:padding-right="0.159cm" fo:padding-top="0.106cm" fo:padding-bottom="0.106cm" fo:border="0.35pt solid #b8c2cc">
        <style:background-image/>
      </style:table-cell-properties>
    </style:style>
    <style:style style:name="表格61" style:family="table">
      <style:table-properties style:width="17.18cm" fo:margin-left="0.056cm" fo:margin-top="0cm" fo:margin-bottom="0cm" table:align="left" style:writing-mode="page"/>
    </style:style>
    <style:style style:name="表格61.A" style:family="table-column">
      <style:table-column-properties style:column-width="17.18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9f5ea" fo:padding-left="0.3cm" fo:padding-right="0.247cm" fo:padding-top="0.159cm" fo:padding-bottom="0.159cm" fo:border-left="3.25pt solid #2e7d32" fo:border-right="0.5pt solid #2e7d32" fo:border-top="0.5pt solid #2e7d32" fo:border-bottom="0.5pt solid #2e7d32">
        <style:background-image/>
      </style:table-cell-properties>
    </style:style>
    <style:style style:name="表格62" style:family="table">
      <style:table-properties style:width="17.18cm" fo:margin-left="0.056cm" fo:margin-top="0cm" fo:margin-bottom="0cm" table:align="left" style:writing-mode="page"/>
    </style:style>
    <style:style style:name="表格62.A" style:family="table-column">
      <style:table-column-properties style:column-width="17.18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f2f3f5" fo:padding-left="0.3cm" fo:padding-right="0.247cm" fo:padding-top="0.159cm" fo:padding-bottom="0.159cm" fo:border-left="3.25pt solid #c0392b" fo:border-right="0.5pt solid #c9ced4" fo:border-top="0.5pt solid #c9ced4" fo:border-bottom="0.5pt solid #c9ced4">
        <style:background-image/>
      </style:table-cell-properties>
    </style:style>
    <style:style style:name="表格63" style:family="table">
      <style:table-properties style:width="17.18cm" fo:margin-left="0.005cm" fo:margin-top="0cm" fo:margin-bottom="0cm" table:align="left" style:writing-mode="page"/>
    </style:style>
    <style:style style:name="表格63.A" style:family="table-column">
      <style:table-column-properties style:column-width="2.997cm"/>
    </style:style>
    <style:style style:name="表格63.B" style:family="table-column">
      <style:table-column-properties style:column-width="4.939cm"/>
    </style:style>
    <style:style style:name="表格63.C" style:family="table-column">
      <style:table-column-properties style:column-width="9.245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middle" fo:background-color="#1b3a5c" fo:padding-left="0.194cm" fo:padding-right="0.159cm" fo:padding-top="0.123cm" fo:padding-bottom="0.123cm" fo:border="0.35pt solid #b8c2cc">
        <style:background-image/>
      </style:table-cell-properties>
    </style:style>
    <style:style style:name="表格63.A2" style:family="table-cell">
      <style:table-cell-properties style:vertical-align="middle" fo:background-color="#ffffff" fo:padding-left="0.194cm" fo:padding-right="0.159cm" fo:padding-top="0.106cm" fo:padding-bottom="0.106cm" fo:border="0.35pt solid #b8c2cc">
        <style:background-image/>
      </style:table-cell-properties>
    </style:style>
    <style:style style:name="表格63.A3" style:family="table-cell">
      <style:table-cell-properties style:vertical-align="middle" fo:background-color="#f4f7fa" fo:padding-left="0.194cm" fo:padding-right="0.159cm" fo:padding-top="0.106cm" fo:padding-bottom="0.106cm" fo:border="0.35pt solid #b8c2cc">
        <style:background-image/>
      </style:table-cell-properties>
    </style:style>
    <style:style style:name="表格64" style:family="table">
      <style:table-properties style:width="17.18cm" fo:margin-left="0.056cm" fo:margin-top="0cm" fo:margin-bottom="0cm" table:align="left" style:writing-mode="page"/>
    </style:style>
    <style:style style:name="表格64.A" style:family="table-column">
      <style:table-column-properties style:column-width="17.18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2f3f5" fo:padding-left="0.3cm" fo:padding-right="0.247cm" fo:padding-top="0.159cm" fo:padding-bottom="0.159cm" fo:border-left="3.25pt solid #2e7d32" fo:border-right="0.5pt solid #c9ced4" fo:border-top="0.5pt solid #c9ced4" fo:border-bottom="0.5pt solid #c9ced4">
        <style:background-image/>
      </style:table-cell-properties>
    </style:style>
    <style:style style:name="表格65" style:family="table">
      <style:table-properties style:width="17.18cm" fo:margin-left="0.056cm" fo:margin-top="0cm" fo:margin-bottom="0cm" table:align="left" style:writing-mode="page"/>
    </style:style>
    <style:style style:name="表格65.A" style:family="table-column">
      <style:table-column-properties style:column-width="17.18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e9f5ea" fo:padding-left="0.3cm" fo:padding-right="0.247cm" fo:padding-top="0.159cm" fo:padding-bottom="0.159cm" fo:border-left="3.25pt solid #2e7d32" fo:border-right="0.5pt solid #2e7d32" fo:border-top="0.5pt solid #2e7d32" fo:border-bottom="0.5pt solid #2e7d32">
        <style:background-image/>
      </style:table-cell-properties>
    </style:style>
    <style:style style:name="表格66" style:family="table">
      <style:table-properties style:width="17.18cm" fo:margin-left="0.056cm" fo:margin-top="0cm" fo:margin-bottom="0cm" table:align="left" style:writing-mode="page"/>
    </style:style>
    <style:style style:name="表格66.A" style:family="table-column">
      <style:table-column-properties style:column-width="17.18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beae8" fo:padding-left="0.3cm" fo:padding-right="0.247cm" fo:padding-top="0.159cm" fo:padding-bottom="0.159cm" fo:border-left="3.25pt solid #c0392b" fo:border-right="0.5pt solid #c0392b" fo:border-top="0.5pt solid #c0392b" fo:border-bottom="0.5pt solid #c0392b">
        <style:background-image/>
      </style:table-cell-properties>
    </style:style>
    <style:style style:name="表格67" style:family="table">
      <style:table-properties style:width="17.18cm" fo:margin-left="0.005cm" fo:margin-top="0cm" fo:margin-bottom="0cm" table:align="left" style:writing-mode="page"/>
    </style:style>
    <style:style style:name="表格67.A" style:family="table-column">
      <style:table-column-properties style:column-width="2.997cm"/>
    </style:style>
    <style:style style:name="表格67.B" style:family="table-column">
      <style:table-column-properties style:column-width="5.117cm"/>
    </style:style>
    <style:style style:name="表格67.C" style:family="table-column">
      <style:table-column-properties style:column-width="2.893cm"/>
    </style:style>
    <style:style style:name="表格67.D" style:family="table-column">
      <style:table-column-properties style:column-width="6.174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b3a5c" fo:padding-left="0.194cm" fo:padding-right="0.159cm" fo:padding-top="0.123cm" fo:padding-bottom="0.123cm" fo:border="0.35pt solid #b8c2cc">
        <style:background-image/>
      </style:table-cell-properties>
    </style:style>
    <style:style style:name="表格67.A2" style:family="table-cell">
      <style:table-cell-properties style:vertical-align="middle" fo:background-color="#ffffff" fo:padding-left="0.194cm" fo:padding-right="0.159cm" fo:padding-top="0.106cm" fo:padding-bottom="0.106cm" fo:border="0.35pt solid #b8c2cc">
        <style:background-image/>
      </style:table-cell-properties>
    </style:style>
    <style:style style:name="表格67.A3" style:family="table-cell">
      <style:table-cell-properties style:vertical-align="middle" fo:background-color="#f4f7fa" fo:padding-left="0.194cm" fo:padding-right="0.159cm" fo:padding-top="0.106cm" fo:padding-bottom="0.106cm" fo:border="0.35pt solid #b8c2cc">
        <style:background-image/>
      </style:table-cell-properties>
    </style:style>
    <style:style style:name="表格68" style:family="table">
      <style:table-properties style:width="17.18cm" fo:margin-left="0.056cm" fo:margin-top="0cm" fo:margin-bottom="0cm" table:align="left" style:writing-mode="page"/>
    </style:style>
    <style:style style:name="表格68.A" style:family="table-column">
      <style:table-column-properties style:column-width="17.18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ff6da" fo:padding-left="0.3cm" fo:padding-right="0.247cm" fo:padding-top="0.159cm" fo:padding-bottom="0.159cm" fo:border-left="3.25pt solid #c99400" fo:border-right="0.5pt solid #c99400" fo:border-top="0.5pt solid #c99400" fo:border-bottom="0.5pt solid #c99400">
        <style:background-image/>
      </style:table-cell-properties>
    </style:style>
    <style:style style:name="表格69" style:family="table">
      <style:table-properties style:width="17.18cm" fo:margin-left="0.056cm" fo:margin-top="0cm" fo:margin-bottom="0cm" table:align="left" style:writing-mode="page"/>
    </style:style>
    <style:style style:name="表格69.A" style:family="table-column">
      <style:table-column-properties style:column-width="17.18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ff6da" fo:padding-left="0.3cm" fo:padding-right="0.247cm" fo:padding-top="0.159cm" fo:padding-bottom="0.159cm" fo:border-left="3.25pt solid #c99400" fo:border-right="0.5pt solid #c99400" fo:border-top="0.5pt solid #c99400" fo:border-bottom="0.5pt solid #c99400">
        <style:background-image/>
      </style:table-cell-properties>
    </style:style>
    <style:style style:name="表格70" style:family="table">
      <style:table-properties style:width="17.18cm" fo:margin-left="0.005cm" fo:margin-top="0cm" fo:margin-bottom="0cm" table:align="left" style:writing-mode="page"/>
    </style:style>
    <style:style style:name="表格70.A" style:family="table-column">
      <style:table-column-properties style:column-width="4.655cm"/>
    </style:style>
    <style:style style:name="表格70.B" style:family="table-column">
      <style:table-column-properties style:column-width="7.234cm"/>
    </style:style>
    <style:style style:name="表格70.C" style:family="table-column">
      <style:table-column-properties style:column-width="5.292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b3a5c" fo:padding-left="0.194cm" fo:padding-right="0.159cm" fo:padding-top="0.123cm" fo:padding-bottom="0.123cm" fo:border="0.35pt solid #b8c2cc">
        <style:background-image/>
      </style:table-cell-properties>
    </style:style>
    <style:style style:name="表格70.A2" style:family="table-cell">
      <style:table-cell-properties style:vertical-align="middle" fo:background-color="#ffffff" fo:padding-left="0.194cm" fo:padding-right="0.159cm" fo:padding-top="0.106cm" fo:padding-bottom="0.106cm" fo:border="0.35pt solid #b8c2cc">
        <style:background-image/>
      </style:table-cell-properties>
    </style:style>
    <style:style style:name="表格70.A3" style:family="table-cell">
      <style:table-cell-properties style:vertical-align="middle" fo:background-color="#f4f7fa" fo:padding-left="0.194cm" fo:padding-right="0.159cm" fo:padding-top="0.106cm" fo:padding-bottom="0.106cm" fo:border="0.35pt solid #b8c2cc">
        <style:background-image/>
      </style:table-cell-properties>
    </style:style>
    <style:style style:name="表格71" style:family="table">
      <style:table-properties style:width="17.18cm" fo:margin-left="0.056cm" fo:margin-top="0cm" fo:margin-bottom="0cm" table:align="left" style:writing-mode="page"/>
    </style:style>
    <style:style style:name="表格71.A" style:family="table-column">
      <style:table-column-properties style:column-width="17.18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8f1f9" fo:padding-left="0.3cm" fo:padding-right="0.247cm" fo:padding-top="0.159cm" fo:padding-bottom="0.159cm" fo:border-left="3.25pt solid #1f6fb2" fo:border-right="0.5pt solid #1f6fb2" fo:border-top="0.5pt solid #1f6fb2" fo:border-bottom="0.5pt solid #1f6fb2">
        <style:background-image/>
      </style:table-cell-properties>
    </style:style>
    <style:style style:name="表格72" style:family="table">
      <style:table-properties style:width="17.18cm" fo:margin-left="0.005cm" fo:margin-top="0cm" fo:margin-bottom="0cm" table:align="left" style:writing-mode="page"/>
    </style:style>
    <style:style style:name="表格72.A" style:family="table-column">
      <style:table-column-properties style:column-width="4.831cm"/>
    </style:style>
    <style:style style:name="表格72.B" style:family="table-column">
      <style:table-column-properties style:column-width="4.129cm"/>
    </style:style>
    <style:style style:name="表格72.C" style:family="table-column">
      <style:table-column-properties style:column-width="4.11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b3a5c" fo:padding-left="0.194cm" fo:padding-right="0.159cm" fo:padding-top="0.123cm" fo:padding-bottom="0.123cm" fo:border="0.35pt solid #b8c2cc">
        <style:background-image/>
      </style:table-cell-properties>
    </style:style>
    <style:style style:name="表格72.A2" style:family="table-cell">
      <style:table-cell-properties style:vertical-align="middle" fo:background-color="#ffffff" fo:padding-left="0.194cm" fo:padding-right="0.159cm" fo:padding-top="0.106cm" fo:padding-bottom="0.106cm" fo:border="0.35pt solid #b8c2cc">
        <style:background-image/>
      </style:table-cell-properties>
    </style:style>
    <style:style style:name="表格72.A3" style:family="table-cell">
      <style:table-cell-properties style:vertical-align="middle" fo:background-color="#f4f7fa" fo:padding-left="0.194cm" fo:padding-right="0.159cm" fo:padding-top="0.106cm" fo:padding-bottom="0.106cm" fo:border="0.35pt solid #b8c2cc">
        <style:background-image/>
      </style:table-cell-properties>
    </style:style>
    <style:style style:name="表格73" style:family="table">
      <style:table-properties style:width="17.18cm" fo:margin-left="0.056cm" fo:margin-top="0cm" fo:margin-bottom="0cm" table:align="left" style:writing-mode="page"/>
    </style:style>
    <style:style style:name="表格73.A" style:family="table-column">
      <style:table-column-properties style:column-width="17.18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e9f5ea" fo:padding-left="0.3cm" fo:padding-right="0.247cm" fo:padding-top="0.159cm" fo:padding-bottom="0.159cm" fo:border-left="3.25pt solid #2e7d32" fo:border-right="0.5pt solid #2e7d32" fo:border-top="0.5pt solid #2e7d32" fo:border-bottom="0.5pt solid #2e7d32">
        <style:background-image/>
      </style:table-cell-properties>
    </style:style>
    <style:style style:name="表格74" style:family="table">
      <style:table-properties style:width="17.18cm" fo:margin-left="0.005cm" fo:margin-top="0cm" fo:margin-bottom="0cm" table:align="left" style:writing-mode="page"/>
    </style:style>
    <style:style style:name="表格74.A" style:family="table-column">
      <style:table-column-properties style:column-width="3.702cm"/>
    </style:style>
    <style:style style:name="表格74.B" style:family="table-column">
      <style:table-column-properties style:column-width="2.91cm"/>
    </style:style>
    <style:style style:name="表格74.E" style:family="table-column">
      <style:table-column-properties style:column-width="2.083cm"/>
    </style:style>
    <style:style style:name="表格74.F" style:family="table-column">
      <style:table-column-properties style:column-width="2.663cm"/>
    </style:style>
    <style:style style:name="表格74.1" style:family="table-row">
      <style:table-row-properties fo:keep-together="auto"/>
    </style:style>
    <style:style style:name="表格74.A1" style:family="table-cell">
      <style:table-cell-properties style:vertical-align="middle" fo:background-color="#1b3a5c" fo:padding-left="0.194cm" fo:padding-right="0.159cm" fo:padding-top="0.123cm" fo:padding-bottom="0.123cm" fo:border="0.35pt solid #b8c2cc">
        <style:background-image/>
      </style:table-cell-properties>
    </style:style>
    <style:style style:name="表格74.A2" style:family="table-cell">
      <style:table-cell-properties style:vertical-align="middle" fo:background-color="#ffffff" fo:padding-left="0.194cm" fo:padding-right="0.159cm" fo:padding-top="0.106cm" fo:padding-bottom="0.106cm" fo:border="0.35pt solid #b8c2cc">
        <style:background-image/>
      </style:table-cell-properties>
    </style:style>
    <style:style style:name="表格74.A3" style:family="table-cell">
      <style:table-cell-properties style:vertical-align="middle" fo:background-color="#f4f7fa" fo:padding-left="0.194cm" fo:padding-right="0.159cm" fo:padding-top="0.106cm" fo:padding-bottom="0.106cm" fo:border="0.35pt solid #b8c2cc">
        <style:background-image/>
      </style:table-cell-properties>
    </style:style>
    <style:style style:name="表格75" style:family="table">
      <style:table-properties style:width="17.18cm" fo:margin-left="0.056cm" fo:margin-top="0cm" fo:margin-bottom="0cm" table:align="left" style:writing-mode="page"/>
    </style:style>
    <style:style style:name="表格75.A" style:family="table-column">
      <style:table-column-properties style:column-width="17.18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fff6da" fo:padding-left="0.3cm" fo:padding-right="0.247cm" fo:padding-top="0.159cm" fo:padding-bottom="0.159cm" fo:border-left="3.25pt solid #c99400" fo:border-right="0.5pt solid #c99400" fo:border-top="0.5pt solid #c99400" fo:border-bottom="0.5pt solid #c99400">
        <style:background-image/>
      </style:table-cell-properties>
    </style:style>
    <style:style style:name="表格76" style:family="table">
      <style:table-properties style:width="17.18cm" fo:margin-left="0.056cm" fo:margin-top="0cm" fo:margin-bottom="0cm" table:align="left" style:writing-mode="page"/>
    </style:style>
    <style:style style:name="表格76.A" style:family="table-column">
      <style:table-column-properties style:column-width="17.18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ff6da" fo:padding-left="0.3cm" fo:padding-right="0.247cm" fo:padding-top="0.159cm" fo:padding-bottom="0.159cm" fo:border-left="3.25pt solid #c99400" fo:border-right="0.5pt solid #c99400" fo:border-top="0.5pt solid #c99400" fo:border-bottom="0.5pt solid #c99400">
        <style:background-image/>
      </style:table-cell-properties>
    </style:style>
    <style:style style:name="表格77" style:family="table">
      <style:table-properties style:width="17.18cm" fo:margin-left="0.005cm" fo:margin-top="0cm" fo:margin-bottom="0cm" table:align="left" style:writing-mode="page"/>
    </style:style>
    <style:style style:name="表格77.A" style:family="table-column">
      <style:table-column-properties style:column-width="2.997cm"/>
    </style:style>
    <style:style style:name="表格77.B" style:family="table-column">
      <style:table-column-properties style:column-width="7.126cm"/>
    </style:style>
    <style:style style:name="表格77.C" style:family="table-column">
      <style:table-column-properties style:column-width="3.53cm"/>
    </style:style>
    <style:style style:name="表格77.D" style:family="table-column">
      <style:table-column-properties style:column-width="3.528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b3a5c" fo:padding-left="0.194cm" fo:padding-right="0.159cm" fo:padding-top="0.123cm" fo:padding-bottom="0.123cm" fo:border="0.35pt solid #b8c2cc">
        <style:background-image/>
      </style:table-cell-properties>
    </style:style>
    <style:style style:name="表格77.A2" style:family="table-cell">
      <style:table-cell-properties style:vertical-align="middle" fo:background-color="#ffffff" fo:padding-left="0.194cm" fo:padding-right="0.159cm" fo:padding-top="0.106cm" fo:padding-bottom="0.106cm" fo:border="0.35pt solid #b8c2cc">
        <style:background-image/>
      </style:table-cell-properties>
    </style:style>
    <style:style style:name="表格77.A3" style:family="table-cell">
      <style:table-cell-properties style:vertical-align="middle" fo:background-color="#f4f7fa" fo:padding-left="0.194cm" fo:padding-right="0.159cm" fo:padding-top="0.106cm" fo:padding-bottom="0.106cm" fo:border="0.35pt solid #b8c2cc">
        <style:background-image/>
      </style:table-cell-properties>
    </style:style>
    <style:style style:name="表格78" style:family="table">
      <style:table-properties style:width="17.18cm" fo:margin-left="0.005cm" fo:margin-top="0cm" fo:margin-bottom="0cm" table:align="left" style:writing-mode="page"/>
    </style:style>
    <style:style style:name="表格78.A" style:family="table-column">
      <style:table-column-properties style:column-width="2.468cm"/>
    </style:style>
    <style:style style:name="表格78.B" style:family="table-column">
      <style:table-column-properties style:column-width="5.821cm"/>
    </style:style>
    <style:style style:name="表格78.C" style:family="table-column">
      <style:table-column-properties style:column-width="5.893cm"/>
    </style:style>
    <style:style style:name="表格78.D" style:family="table-column">
      <style:table-column-properties style:column-width="2.999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b3a5c" fo:padding-left="0.194cm" fo:padding-right="0.159cm" fo:padding-top="0.123cm" fo:padding-bottom="0.123cm" fo:border="0.35pt solid #b8c2cc">
        <style:background-image/>
      </style:table-cell-properties>
    </style:style>
    <style:style style:name="表格78.A2" style:family="table-cell">
      <style:table-cell-properties style:vertical-align="middle" fo:background-color="#ffffff" fo:padding-left="0.194cm" fo:padding-right="0.159cm" fo:padding-top="0.106cm" fo:padding-bottom="0.106cm" fo:border="0.35pt solid #b8c2cc">
        <style:background-image/>
      </style:table-cell-properties>
    </style:style>
    <style:style style:name="表格78.A3" style:family="table-cell">
      <style:table-cell-properties style:vertical-align="middle" fo:background-color="#f4f7fa" fo:padding-left="0.194cm" fo:padding-right="0.159cm" fo:padding-top="0.106cm" fo:padding-bottom="0.106cm" fo:border="0.35pt solid #b8c2cc">
        <style:background-image/>
      </style:table-cell-properties>
    </style:style>
    <style:style style:name="表格79" style:family="table">
      <style:table-properties style:width="17.18cm" fo:margin-left="0.056cm" fo:margin-top="0cm" fo:margin-bottom="0cm" table:align="left" style:writing-mode="page"/>
    </style:style>
    <style:style style:name="表格79.A" style:family="table-column">
      <style:table-column-properties style:column-width="17.18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9f5ea" fo:padding-left="0.3cm" fo:padding-right="0.247cm" fo:padding-top="0.159cm" fo:padding-bottom="0.159cm" fo:border-left="3.25pt solid #2e7d32" fo:border-right="0.5pt solid #2e7d32" fo:border-top="0.5pt solid #2e7d32" fo:border-bottom="0.5pt solid #2e7d32">
        <style:background-image/>
      </style:table-cell-properties>
    </style:style>
    <style:style style:name="表格80" style:family="table">
      <style:table-properties style:width="17.18cm" fo:margin-left="0.056cm" fo:margin-top="0cm" fo:margin-bottom="0cm" table:align="left" style:writing-mode="page"/>
    </style:style>
    <style:style style:name="表格80.A" style:family="table-column">
      <style:table-column-properties style:column-width="17.18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e9f5ea" fo:padding-left="0.3cm" fo:padding-right="0.247cm" fo:padding-top="0.159cm" fo:padding-bottom="0.159cm" fo:border-left="3.25pt solid #2e7d32" fo:border-right="0.5pt solid #2e7d32" fo:border-top="0.5pt solid #2e7d32" fo:border-bottom="0.5pt solid #2e7d32">
        <style:background-image/>
      </style:table-cell-properties>
    </style:style>
    <style:style style:name="表格81" style:family="table">
      <style:table-properties style:width="17.18cm" fo:margin-left="0.056cm" fo:margin-top="0cm" fo:margin-bottom="0cm" table:align="left" style:writing-mode="page"/>
    </style:style>
    <style:style style:name="表格81.A" style:family="table-column">
      <style:table-column-properties style:column-width="17.18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ff6da" fo:padding-left="0.3cm" fo:padding-right="0.247cm" fo:padding-top="0.159cm" fo:padding-bottom="0.159cm" fo:border-left="3.25pt solid #c99400" fo:border-right="0.5pt solid #c99400" fo:border-top="0.5pt solid #c99400" fo:border-bottom="0.5pt solid #c99400">
        <style:background-image/>
      </style:table-cell-properties>
    </style:style>
    <style:style style:name="表格82" style:family="table">
      <style:table-properties style:width="17.18cm" fo:margin-left="0.056cm" fo:margin-top="0cm" fo:margin-bottom="0cm" table:align="left" style:writing-mode="page"/>
    </style:style>
    <style:style style:name="表格82.A" style:family="table-column">
      <style:table-column-properties style:column-width="17.18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9f5ea" fo:padding-left="0.3cm" fo:padding-right="0.247cm" fo:padding-top="0.159cm" fo:padding-bottom="0.159cm" fo:border-left="3.25pt solid #2e7d32" fo:border-right="0.5pt solid #2e7d32" fo:border-top="0.5pt solid #2e7d32" fo:border-bottom="0.5pt solid #2e7d32">
        <style:background-image/>
      </style:table-cell-properties>
    </style:style>
    <style:style style:name="表格83" style:family="table">
      <style:table-properties style:width="17.18cm" fo:margin-left="0.056cm" fo:margin-top="0cm" fo:margin-bottom="0cm" table:align="left" style:writing-mode="page"/>
    </style:style>
    <style:style style:name="表格83.A" style:family="table-column">
      <style:table-column-properties style:column-width="17.18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e9f5ea" fo:padding-left="0.3cm" fo:padding-right="0.247cm" fo:padding-top="0.159cm" fo:padding-bottom="0.159cm" fo:border-left="3.25pt solid #2e7d32" fo:border-right="0.5pt solid #2e7d32" fo:border-top="0.5pt solid #2e7d32" fo:border-bottom="0.5pt solid #2e7d32">
        <style:background-image/>
      </style:table-cell-properties>
    </style:style>
    <style:style style:name="表格84" style:family="table">
      <style:table-properties style:width="17.18cm" fo:margin-left="0.056cm" fo:margin-top="0cm" fo:margin-bottom="0cm" table:align="left" style:writing-mode="page"/>
    </style:style>
    <style:style style:name="表格84.A" style:family="table-column">
      <style:table-column-properties style:column-width="17.18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9f5ea" fo:padding-left="0.3cm" fo:padding-right="0.247cm" fo:padding-top="0.159cm" fo:padding-bottom="0.159cm" fo:border-left="3.25pt solid #2e7d32" fo:border-right="0.5pt solid #2e7d32" fo:border-top="0.5pt solid #2e7d32" fo:border-bottom="0.5pt solid #2e7d32">
        <style:background-image/>
      </style:table-cell-properties>
    </style:style>
    <style:style style:name="表格85" style:family="table">
      <style:table-properties style:width="17.18cm" fo:margin-left="0.056cm" fo:margin-top="0cm" fo:margin-bottom="0cm" table:align="left" style:writing-mode="page"/>
    </style:style>
    <style:style style:name="表格85.A" style:family="table-column">
      <style:table-column-properties style:column-width="17.18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e9f5ea" fo:padding-left="0.3cm" fo:padding-right="0.247cm" fo:padding-top="0.159cm" fo:padding-bottom="0.159cm" fo:border-left="3.25pt solid #2e7d32" fo:border-right="0.5pt solid #2e7d32" fo:border-top="0.5pt solid #2e7d32" fo:border-bottom="0.5pt solid #2e7d32">
        <style:background-image/>
      </style:table-cell-properties>
    </style:style>
    <style:style style:name="表格86" style:family="table">
      <style:table-properties style:width="17.18cm" fo:margin-left="0.056cm" fo:margin-top="0cm" fo:margin-bottom="0cm" table:align="left" style:writing-mode="page"/>
    </style:style>
    <style:style style:name="表格86.A" style:family="table-column">
      <style:table-column-properties style:column-width="17.18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e9f5ea" fo:padding-left="0.3cm" fo:padding-right="0.247cm" fo:padding-top="0.159cm" fo:padding-bottom="0.159cm" fo:border-left="3.25pt solid #2e7d32" fo:border-right="0.5pt solid #2e7d32" fo:border-top="0.5pt solid #2e7d32" fo:border-bottom="0.5pt solid #2e7d32">
        <style:background-image/>
      </style:table-cell-properties>
    </style:style>
    <style:style style:name="表格87" style:family="table">
      <style:table-properties style:width="17.18cm" fo:margin-left="0.056cm" fo:margin-top="0cm" fo:margin-bottom="0cm" table:align="left" style:writing-mode="page"/>
    </style:style>
    <style:style style:name="表格87.A" style:family="table-column">
      <style:table-column-properties style:column-width="17.18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e9f5ea" fo:padding-left="0.3cm" fo:padding-right="0.247cm" fo:padding-top="0.159cm" fo:padding-bottom="0.159cm" fo:border-left="3.25pt solid #2e7d32" fo:border-right="0.5pt solid #2e7d32" fo:border-top="0.5pt solid #2e7d32" fo:border-bottom="0.5pt solid #2e7d32">
        <style:background-image/>
      </style:table-cell-properties>
    </style:style>
    <style:style style:name="P1" style:family="paragraph" style:parent-style-name="Standard">
      <style:paragraph-properties fo:margin-top="1.235cm" fo:margin-bottom="0cm" style:contextual-spacing="false" fo:text-align="center" style:justify-single-word="false"/>
    </style:style>
    <style:style style:name="P2" style:family="paragraph" style:parent-style-name="Standard">
      <style:paragraph-properties fo:margin-top="0.388cm" fo:margin-bottom="0cm" style:contextual-spacing="false" fo:text-align="center" style:justify-single-word="false"/>
    </style:style>
    <style:style style:name="P3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4" style:family="paragraph" style:parent-style-name="Standard">
      <style:paragraph-properties fo:margin-top="0.459cm" fo:margin-bottom="0cm" style:contextual-spacing="false" fo:text-align="center" style:justify-single-word="false" fo:padding-left="0cm" fo:padding-right="0cm" fo:padding-top="0.353cm" fo:padding-bottom="0.353cm" fo:border-left="none" fo:border-right="none" fo:border-top="1.5pt solid #c8761a" fo:border-bottom="1.5pt solid #c8761a"/>
    </style:style>
    <style:style style:name="P5" style:family="paragraph" style:parent-style-name="Standard">
      <style:paragraph-properties fo:margin-top="0.353cm" fo:margin-bottom="0cm" style:contextual-spacing="false" fo:text-align="center" style:justify-single-word="false"/>
    </style:style>
    <style:style style:name="P6" style:family="paragraph" style:parent-style-name="Standard">
      <style:paragraph-properties fo:margin-top="0.106cm" fo:margin-bottom="0cm" style:contextual-spacing="false" fo:text-align="center" style:justify-single-word="false"/>
    </style:style>
    <style:style style:name="P7" style:family="paragraph" style:parent-style-name="Standard">
      <style:paragraph-properties fo:margin-top="0.917cm" fo:margin-bottom="0.159cm" style:contextual-spacing="false" fo:text-align="center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top="0.123cm" fo:margin-bottom="0cm" style:contextual-spacing="false" fo:text-align="center" style:justify-single-word="false"/>
    </style:style>
    <style:style style:name="P10" style:family="paragraph" style:parent-style-name="Standard">
      <style:paragraph-properties fo:margin-top="0cm" fo:margin-bottom="0.282cm" style:contextual-spacing="false" fo:break-before="page" fo:padding-left="0cm" fo:padding-right="0cm" fo:padding-top="0cm" fo:padding-bottom="0.212cm" fo:border-left="none" fo:border-right="none" fo:border-top="none" fo:border-bottom="2.24pt solid #c8761a"/>
    </style:style>
    <style:style style:name="P11" style:family="paragraph" style:parent-style-name="Standard">
      <style:paragraph-properties fo:margin-top="0.071cm" fo:margin-bottom="0.071cm" style:contextual-spacing="false"/>
    </style:style>
    <style:style style:name="P12" style:family="paragraph" style:parent-style-name="Heading_20_1">
      <style:paragraph-properties fo:margin-top="0cm" fo:margin-bottom="0.265cm" style:contextual-spacing="false" fo:break-before="page" fo:padding-left="0cm" fo:padding-right="0cm" fo:padding-top="0cm" fo:padding-bottom="0.212cm" fo:border-left="none" fo:border-right="none" fo:border-top="none" fo:border-bottom="2.24pt solid #c8761a"/>
    </style:style>
    <style:style style:name="P13" style:family="paragraph" style:parent-style-name="Standard">
      <style:paragraph-properties fo:margin-top="0.053cm" fo:margin-bottom="0.123cm" style:contextual-spacing="false" fo:line-height="120%"/>
    </style:style>
    <style:style style:name="P14" style:family="paragraph" style:parent-style-name="Heading_20_2">
      <style:paragraph-properties fo:margin-top="0.423cm" fo:margin-bottom="0.176cm" style:contextual-spacing="false"/>
    </style:style>
    <style:style style:name="P15" style:family="paragraph" style:parent-style-name="Standard">
      <style:paragraph-properties fo:margin-top="0cm" fo:margin-bottom="0cm" style:contextual-spacing="false" fo:line-height="105%" fo:text-align="center" style:justify-single-word="false"/>
    </style:style>
    <style:style style:name="P16" style:family="paragraph" style:parent-style-name="Standard">
      <style:paragraph-properties fo:margin-top="0cm" fo:margin-bottom="0cm" style:contextual-spacing="false" fo:line-height="110%" fo:text-align="left" style:justify-single-word="false"/>
    </style:style>
    <style:style style:name="P17" style:family="paragraph" style:parent-style-name="Standard">
      <style:paragraph-properties fo:margin-top="0cm" fo:margin-bottom="0cm" style:contextual-spacing="false" fo:line-height="110%" fo:text-align="center" style:justify-single-word="false"/>
    </style:style>
    <style:style style:name="P18" style:family="paragraph" style:parent-style-name="Standard">
      <style:paragraph-properties fo:margin-top="0cm" fo:margin-bottom="0.141cm" style:contextual-spacing="false"/>
    </style:style>
    <style:style style:name="P19" style:family="paragraph" style:parent-style-name="Standard">
      <style:paragraph-properties fo:margin-top="0cm" fo:margin-bottom="0.106cm" style:contextual-spacing="false" fo:line-height="115%"/>
    </style:style>
    <style:style style:name="P20" style:family="paragraph" style:parent-style-name="Standard">
      <style:paragraph-properties fo:margin-top="0cm" fo:margin-bottom="0.064cm" style:contextual-spacing="false" fo:line-height="113%"/>
    </style:style>
    <style:style style:name="P21" style:family="paragraph" style:parent-style-name="Standard">
      <style:paragraph-properties fo:margin-top="0cm" fo:margin-bottom="0cm" style:contextual-spacing="false" fo:line-height="113%"/>
    </style:style>
    <style:style style:name="P22" style:family="paragraph" style:parent-style-name="Standard">
      <style:paragraph-properties fo:margin-top="0cm" fo:margin-bottom="0.071cm" style:contextual-spacing="false"/>
    </style:style>
    <style:style style:name="P23" style:family="paragraph" style:parent-style-name="Standard">
      <style:paragraph-properties fo:margin-top="0cm" fo:margin-bottom="0.123cm" style:contextual-spacing="false"/>
    </style:style>
    <style:style style:name="P24" style:family="paragraph" style:parent-style-name="Standard">
      <style:paragraph-properties fo:margin-top="0cm" fo:margin-bottom="0cm" style:contextual-spacing="false" fo:line-height="95%"/>
    </style:style>
    <style:style style:name="P25" style:family="paragraph" style:parent-style-name="Standard">
      <style:paragraph-properties fo:margin-top="0cm" fo:margin-bottom="0cm" style:contextual-spacing="false" fo:line-height="96%"/>
    </style:style>
    <style:style style:name="P26" style:family="paragraph" style:parent-style-name="Standard">
      <style:paragraph-properties fo:margin-top="0cm" fo:margin-bottom="0.088cm" style:contextual-spacing="false"/>
    </style:style>
    <style:style style:name="P27" style:family="paragraph" style:parent-style-name="Standard">
      <style:paragraph-properties fo:margin-top="0cm" fo:margin-bottom="0.106cm" style:contextual-spacing="false"/>
    </style:style>
    <style:style style:name="P28" style:family="paragraph" style:parent-style-name="List_20_Paragraph" style:list-style-name="WWNum2">
      <style:paragraph-properties fo:margin-top="0.018cm" fo:margin-bottom="0.071cm" style:contextual-spacing="false" fo:line-height="117%"/>
    </style:style>
    <style:style style:name="P29" style:family="paragraph" style:parent-style-name="Heading_20_3">
      <style:paragraph-properties fo:margin-top="0.3cm" fo:margin-bottom="0.123cm" style:contextual-spacing="false"/>
    </style:style>
    <style:style style:name="P30" style:family="paragraph" style:parent-style-name="Standard">
      <style:paragraph-properties fo:margin-top="0cm" fo:margin-bottom="0.035cm" style:contextual-spacing="false"/>
    </style:style>
    <style:style style:name="P31" style:family="paragraph" style:parent-style-name="Heading_20_2">
      <style:paragraph-properties fo:margin-top="0cm" fo:margin-bottom="0.176cm" style:contextual-spacing="false" fo:break-before="page"/>
    </style:style>
    <style:style style:name="P32" style:family="paragraph" style:parent-style-name="Standard">
      <style:paragraph-properties fo:margin-top="0cm" fo:margin-bottom="0.053cm" style:contextual-spacing="false"/>
    </style:style>
    <style:style style:name="T1" style:family="text">
      <style:text-properties fo:color="#c8761a" loext:opacity="100%" style:font-name="Microsoft JhengHei" fo:font-size="13pt" fo:letter-spacing="0.106cm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T2" style:family="text">
      <style:text-properties fo:color="#1b3a5c" loext:opacity="100%" style:font-name="Microsoft JhengHei" fo:font-size="32pt" fo:font-weight="bold" style:font-name-asian="Microsoft JhengHei2" style:font-size-asian="32pt" style:font-weight-asian="bold" style:font-name-complex="Microsoft JhengHei2" style:font-size-complex="32pt" style:font-weight-complex="bold"/>
    </style:style>
    <style:style style:name="T3" style:family="text">
      <style:text-properties fo:color="#1b3a5c" loext:opacity="100%" style:font-name="Microsoft JhengHei" fo:font-size="20pt" fo:letter-spacing="0.212cm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4" style:family="text">
      <style:text-properties fo:color="#2c4a66" loext:opacity="100%" style:font-name="Microsoft JhengHei" fo:font-size="12pt" fo:font-weight="bold" style:font-name-asian="Microsoft JhengHei2" style:font-size-asian="12pt" style:font-weight-asian="bold" style:font-name-complex="Microsoft JhengHei2" style:font-size-complex="12pt" style:font-weight-complex="bold"/>
    </style:style>
    <style:style style:name="T5" style:family="text">
      <style:text-properties fo:color="#55606a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6" style:family="text">
      <style:text-properties fo:color="#55606a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7" style:family="text">
      <style:text-properties fo:color="#1b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2e7d32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T10" style:family="text">
      <style:text-properties fo:color="#33414c" loext:opacity="100%" style:font-name="Microsoft JhengHei" fo:font-size="9.5pt" style:font-name-asian="Microsoft JhengHei2" style:font-size-asian="9.5pt" style:font-name-complex="Microsoft JhengHei2" style:font-size-complex="9.5pt"/>
    </style:style>
    <style:style style:name="T11" style:family="text">
      <style:text-properties fo:color="#c99400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T12" style:family="text">
      <style:text-properties fo:color="#c0392b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T13" style:family="text">
      <style:text-properties fo:color="#1f6fb2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T14" style:family="text">
      <style:text-properties fo:color="#8a929b" loext:opacity="100%" style:font-name="Microsoft JhengHei" fo:font-size="9pt" style:font-name-asian="Microsoft JhengHei2" style:font-size-asian="9pt" style:font-name-complex="Microsoft JhengHei2" style:font-size-complex="9pt"/>
    </style:style>
    <style:style style:name="T15" style:family="text">
      <style:text-properties fo:color="#1b3a5c" loext:opacity="100%" style:font-name="Microsoft JhengHei" fo:font-size="17pt" fo:font-weight="bold" style:font-name-asian="Microsoft JhengHei2" style:font-size-asian="17pt" style:font-weight-asian="bold" style:font-name-complex="Microsoft JhengHei2" style:font-size-complex="17pt" style:font-weight-complex="bold"/>
    </style:style>
    <style:style style:name="T16" style:family="text">
      <style:text-properties fo:color="#c8761a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7" style:family="text">
      <style:text-properties fo:color="#2c3e5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18" style:family="text">
      <style:text-properties fo:color="#c8761a" loext:opacity="100%" style:font-name="Microsoft JhengHei" fo:font-size="17pt" fo:font-weight="bold" style:font-name-asian="Microsoft JhengHei2" style:font-size-asian="17pt" style:font-weight-asian="bold" style:font-name-complex="Microsoft JhengHei2" style:font-size-complex="17pt" style:font-weight-complex="bold"/>
    </style:style>
    <style:style style:name="T19" style:family="text">
      <style:text-properties fo:color="#1b3a5c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20" style:family="text">
      <style:text-properties fo:color="#1f2a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" style:family="text">
      <style:text-properties fo:color="#1f2a33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" style:family="text">
      <style:text-properties fo:color="#c8761a" loext:opacity="100%" style:font-name="Microsoft JhengHei" fo:font-size="13pt" style:font-name-asian="Microsoft JhengHei2" style:font-size-asian="13pt" style:font-name-complex="Microsoft JhengHei2" style:font-size-complex="13pt"/>
    </style:style>
    <style:style style:name="T23" style:family="text">
      <style:text-properties fo:color="#1b3a5c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24" style:family="text"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5" style:family="text">
      <style:text-properties fo:color="#1f2a33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6" style:family="text">
      <style:text-properties fo:color="#c0392b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" style:family="text">
      <style:text-properties fo:color="#c039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8" style:family="text">
      <style:text-properties fo:color="#1b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" style:family="text">
      <style:text-properties style:font-name="Microsoft JhengHei" fo:font-size="10.5pt" style:font-name-asian="Microsoft JhengHei2" style:font-size-asian="10.5pt" style:font-name-complex="Microsoft JhengHei2" style:font-size-complex="10.5pt"/>
    </style:style>
    <style:style style:name="T30" style:family="text">
      <style:text-properties fo:color="#1b5e20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31" style:family="text">
      <style:text-properties fo:color="#1b5e2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" style:family="text">
      <style:text-properties fo:color="#1f2a33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33" style:family="text">
      <style:text-properties fo:color="#962018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34" style:family="text">
      <style:text-properties fo:color="#962018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5" style:family="text">
      <style:text-properties fo:color="#2e7d32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36" style:family="text">
      <style:text-properties fo:color="#10456e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37" style:family="text">
      <style:text-properties fo:color="#10456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8" style:family="text">
      <style:text-properties fo:color="#26333d" loext:opacity="100%" fo:font-family="MingLiU" style:font-family-generic="roman" style:font-pitch="variable" fo:font-size="8pt" style:font-family-asian="MingLiU" style:font-family-generic-asian="system" style:font-pitch-asian="variable" style:font-size-asian="8pt" style:font-family-complex="MingLiU" style:font-family-generic-complex="system" style:font-pitch-complex="variable" style:font-size-complex="8pt"/>
    </style:style>
    <style:style style:name="T39" style:family="text">
      <style:text-properties fo:color="#26333d" loext:opacity="100%" fo:font-family="MingLiU" style:font-family-generic="roman" style:font-pitch="variable" fo:font-size="8.5pt" style:font-family-asian="MingLiU" style:font-family-generic-asian="system" style:font-pitch-asian="variable" style:font-size-asian="8.5pt" style:font-family-complex="MingLiU" style:font-family-generic-complex="system" style:font-pitch-complex="variable" style:font-size-complex="8.5pt"/>
    </style:style>
    <style:style style:name="T40" style:family="text">
      <style:text-properties fo:color="#8a6100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41" style:family="text">
      <style:text-properties fo:color="#8a610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2" style:family="text">
      <style:text-properties fo:color="#1b3a5c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43" style:family="text">
      <style:text-properties fo:color="#2c4a66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4" style:family="text">
      <style:text-properties fo:color="#2e7d32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" style:family="text">
      <style:text-properties fo:color="#ffff00" loext:opacity="100%" style:font-name="Microsoft JhengHei" fo:font-size="10pt" fo:font-style="normal" fo:font-weight="bold" fo:background-color="#ff3d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公職考試 ‧ 資料結構</text:span></text:p>
      <text:p text:style-name="P2"><text:span text:style-name="T2">樹結構與 Heap</text:span></text:p>
      <text:p text:style-name="P3"><text:span text:style-name="T3">終 極 衝 刺 筆 記</text:span></text:p>
      <text:p text:style-name="P4"><text:span text:style-name="T4">BST ‧ AVL ‧ Red-Black Tree ‧ (2,4)-Tree ‧ Heap</text:span></text:p>
      <text:p text:style-name="P5"><text:span text:style-name="T5">高普考 ‧ 地方特考 ‧ 關務特考 適用</text:span></text:p>
      <text:p text:style-name="P6"><text:span text:style-name="T6">觀念 → 規則 → 範例 → 口訣 → 考點　一氣呵成</text:span></text:p>
      <text:p text:style-name="P7"><text:span text:style-name="T7">本筆記色彩系統（看顏色就知道重點）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8"><text:span text:style-name="T8">✅</text:span></text:p>
          </table:table-cell>
          <table:table-cell table:style-name="表格1.A1" office:value-type="string">
            <text:p text:style-name="Standard"><text:span text:style-name="T9">綠 = 結論 / 口訣</text:span></text:p>
          </table:table-cell>
          <table:table-cell table:style-name="表格1.C1" office:value-type="string">
            <text:p text:style-name="Standard"><text:span text:style-name="T10">整段觀念的最後結論，以及最好背的記憶口訣。</text:span></text:p>
          </table:table-cell>
        </table:table-row>
        <table:table-row table:style-name="表格1.1">
          <table:table-cell table:style-name="表格1.A2" office:value-type="string">
            <text:p text:style-name="P8"><text:span text:style-name="T8">⭐</text:span></text:p>
          </table:table-cell>
          <table:table-cell table:style-name="表格1.A2" office:value-type="string">
            <text:p text:style-name="Standard"><text:span text:style-name="T11">黃 = 考點 / 必背</text:span></text:p>
          </table:table-cell>
          <table:table-cell table:style-name="表格1.C1" office:value-type="string">
            <text:p text:style-name="Standard"><text:span text:style-name="T10">考試一定要會、要默背的公式或要點。</text:span></text:p>
          </table:table-cell>
        </table:table-row>
        <table:table-row table:style-name="表格1.1">
          <table:table-cell table:style-name="表格1.A3" office:value-type="string">
            <text:p text:style-name="P8"><text:span text:style-name="T8">⚠️</text:span></text:p>
          </table:table-cell>
          <table:table-cell table:style-name="表格1.A3" office:value-type="string">
            <text:p text:style-name="Standard"><text:span text:style-name="T12">紅 = 陷阱 / 易錯</text:span></text:p>
          </table:table-cell>
          <table:table-cell table:style-name="表格1.C1" office:value-type="string">
            <text:p text:style-name="Standard"><text:span text:style-name="T10">最常混淆、最容易被扣分的地雷。</text:span></text:p>
          </table:table-cell>
        </table:table-row>
        <table:table-row table:style-name="表格1.1">
          <table:table-cell table:style-name="表格1.A4" office:value-type="string">
            <text:p text:style-name="P8"><text:span text:style-name="T8">💡</text:span></text:p>
          </table:table-cell>
          <table:table-cell table:style-name="表格1.A4" office:value-type="string">
            <text:p text:style-name="Standard"><text:span text:style-name="T13">藍 = 深入推導 / 為什麼</text:span></text:p>
          </table:table-cell>
          <table:table-cell table:style-name="表格1.C1" office:value-type="string">
            <text:p text:style-name="Standard"><text:span text:style-name="T10">想通「為什麼」的原理推導，理解後就不必硬背。</text:span></text:p>
          </table:table-cell>
        </table:table-row>
      </table:table>
      <text:p text:style-name="P9"><text:span text:style-name="T14">灰底等寬框 = 樹狀圖／陣列圖示</text:span></text:p>
      <text:p text:style-name="Standard"/>
      <text:p text:style-name="P10"><text:span text:style-name="T15">目　錄</text:span></text:p>
      <text:p text:style-name="P11"><text:span text:style-name="T16">第一章　</text:span><text:span text:style-name="T17">三種樹結構總覽</text:span></text:p>
      <text:p text:style-name="P11"><text:span text:style-name="T16">第二章　</text:span><text:span text:style-name="T17">為什麼都是 O(log n)？（深入理解）</text:span></text:p>
      <text:p text:style-name="P11"><text:span text:style-name="T16">第三章　</text:span><text:span text:style-name="T17">BST 二元搜尋樹</text:span></text:p>
      <text:p text:style-name="P11"><text:span text:style-name="T16">第四章　</text:span><text:span text:style-name="T17">AVL Tree 平衡二元搜尋樹</text:span></text:p>
      <text:p text:style-name="P11"><text:span text:style-name="T16">第五章　</text:span><text:span text:style-name="T17">AVL 實作範例（113 高考 Q3）</text:span></text:p>
      <text:p text:style-name="P11"><text:span text:style-name="T16">第六章　</text:span><text:span text:style-name="T17">Red-Black Tree 紅黑樹（五大規則＋口訣）</text:span></text:p>
      <text:p text:style-name="P11"><text:span text:style-name="T16">第七章　</text:span><text:span text:style-name="T17">用 (2,4)-Tree 徹底理解紅黑樹</text:span></text:p>
      <text:p text:style-name="P11"><text:span text:style-name="T16">第八章　</text:span><text:span text:style-name="T17">AVL vs RBT 完整比較</text:span></text:p>
      <text:p text:style-name="P11"><text:span text:style-name="T16">第九章　</text:span><text:span text:style-name="T17">RBT 實作範例（115 關務 Q4）</text:span></text:p>
      <text:p text:style-name="P11"><text:span text:style-name="T16">第十章　</text:span><text:span text:style-name="T17">Heap 堆積與 Priority Queue</text:span></text:p>
      <text:p text:style-name="P11"><text:span text:style-name="T16">第十一章　</text:span><text:span text:style-name="T17">排序法時間複雜度完整比較</text:span></text:p>
      <text:p text:style-name="P11"><text:span text:style-name="T16">第十二章　</text:span><text:span text:style-name="T17">考前速記總整理</text:span></text:p>
      <text:p text:style-name="P11"><text:span text:style-name="T16">附　錄　</text:span><text:span text:style-name="T17">一分鐘衝刺速背版</text:span></text:p>
      <text:p text:style-name="Standard"/>
      <text:h text:style-name="P12" text:outline-level="1"><text:span text:style-name="T18">第一章 <text:s/></text:span><text:span text:style-name="T19">三種樹結構總覽</text:span></text:h>
      <text:p text:style-name="P13"><text:span text:style-name="T20">本筆記涵蓋公職考試資料結構中最常考的三種樹：</text:span><text:span text:style-name="T21">BST（二元搜尋樹）</text:span><text:span text:style-name="T20">、</text:span><text:span text:style-name="T21">AVL Tree（平衡二元搜尋樹）</text:span><text:span text:style-name="T20"> 以及 </text:span><text:span text:style-name="T21">Red-Black Tree（紅黑樹）</text:span><text:span text:style-name="T20">。三者都以 BST 為基礎，但各有不同的平衡策略，適用場景也不同；最後再加上不屬於搜尋樹、但同樣重要的 </text:span><text:span text:style-name="T21">Heap</text:span><text:span text:style-name="T20">。</text:span></text:p>
      <text:h text:style-name="P14" text:outline-level="2"><text:span text:style-name="T22">▍</text:span><text:span text:style-name="T23">1.1　五大結構效能總表</text:span>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header-rows>
          <table:table-row table:style-name="表格2.1">
            <table:table-cell table:style-name="表格2.A1" office:value-type="string">
              <text:p text:style-name="P15"><text:span text:style-name="T24">結構</text:span></text:p>
            </table:table-cell>
            <table:table-cell table:style-name="表格2.A1" office:value-type="string">
              <text:p text:style-name="P15"><text:span text:style-name="T24">最擅長</text:span></text:p>
            </table:table-cell>
            <table:table-cell table:style-name="表格2.A1" office:value-type="string">
              <text:p text:style-name="P15"><text:span text:style-name="T24">搜尋</text:span></text:p>
            </table:table-cell>
            <table:table-cell table:style-name="表格2.A1" office:value-type="string">
              <text:p text:style-name="P15"><text:span text:style-name="T24">插入</text:span></text:p>
            </table:table-cell>
            <table:table-cell table:style-name="表格2.A1" office:value-type="string">
              <text:p text:style-name="P15"><text:span text:style-name="T24">刪除</text:span></text:p>
            </table:table-cell>
            <table:table-cell table:style-name="表格2.A1" office:value-type="string">
              <text:p text:style-name="P15"><text:span text:style-name="T24">最差情況</text:span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6"><text:span text:style-name="T25">BST</text:span></text:p>
          </table:table-cell>
          <table:table-cell table:style-name="表格2.A2" office:value-type="string">
            <text:p text:style-name="P17"><text:span text:style-name="T25">快速搜尋（但不穩定）</text:span></text:p>
          </table:table-cell>
          <table:table-cell table:style-name="表格2.A2" office:value-type="string">
            <text:p text:style-name="P17"><text:span text:style-name="T25">O(log n) 平均</text:span></text:p>
          </table:table-cell>
          <table:table-cell table:style-name="表格2.A2" office:value-type="string">
            <text:p text:style-name="P17"><text:span text:style-name="T25">O(log n) 平均</text:span></text:p>
          </table:table-cell>
          <table:table-cell table:style-name="表格2.A2" office:value-type="string">
            <text:p text:style-name="P17"><text:span text:style-name="T25">O(log n) 平均</text:span></text:p>
          </table:table-cell>
          <table:table-cell table:style-name="表格2.A2" office:value-type="string">
            <text:p text:style-name="P17"><text:span text:style-name="T26">O(n)</text:span><text:span text:style-name="T27"> 退化</text:span></text:p>
          </table:table-cell>
        </table:table-row>
        <table:table-row table:style-name="表格2.1">
          <table:table-cell table:style-name="表格2.A3" office:value-type="string">
            <text:p text:style-name="P16"><text:span text:style-name="T25">AVL</text:span></text:p>
          </table:table-cell>
          <table:table-cell table:style-name="表格2.A3" office:value-type="string">
            <text:p text:style-name="P17"><text:span text:style-name="T25">查詢最快（嚴格平衡）</text:span></text:p>
          </table:table-cell>
          <table:table-cell table:style-name="表格2.A3" office:value-type="string">
            <text:p text:style-name="P17"><text:span text:style-name="T25">O(log n)</text:span></text:p>
          </table:table-cell>
          <table:table-cell table:style-name="表格2.A3" office:value-type="string">
            <text:p text:style-name="P17"><text:span text:style-name="T25">O(log n)</text:span></text:p>
          </table:table-cell>
          <table:table-cell table:style-name="表格2.A3" office:value-type="string">
            <text:p text:style-name="P17"><text:span text:style-name="T25">O(log n)</text:span></text:p>
          </table:table-cell>
          <table:table-cell table:style-name="表格2.A3" office:value-type="string">
            <text:p text:style-name="P17"><text:span text:style-name="T25">O(log n)</text:span></text:p>
          </table:table-cell>
        </table:table-row>
        <table:table-row table:style-name="表格2.1">
          <table:table-cell table:style-name="表格2.A2" office:value-type="string">
            <text:p text:style-name="P16"><text:span text:style-name="T25">Red-Black Tree</text:span></text:p>
          </table:table-cell>
          <table:table-cell table:style-name="表格2.A2" office:value-type="string">
            <text:p text:style-name="P17"><text:span text:style-name="T25">插入/刪除較快</text:span></text:p>
          </table:table-cell>
          <table:table-cell table:style-name="表格2.A2" office:value-type="string">
            <text:p text:style-name="P17"><text:span text:style-name="T25">O(log n)</text:span></text:p>
          </table:table-cell>
          <table:table-cell table:style-name="表格2.A2" office:value-type="string">
            <text:p text:style-name="P17"><text:span text:style-name="T25">O(log n)</text:span></text:p>
          </table:table-cell>
          <table:table-cell table:style-name="表格2.A2" office:value-type="string">
            <text:p text:style-name="P17"><text:span text:style-name="T25">O(log n)</text:span></text:p>
          </table:table-cell>
          <table:table-cell table:style-name="表格2.A2" office:value-type="string">
            <text:p text:style-name="P17"><text:span text:style-name="T25">O(log n)</text:span></text:p>
          </table:table-cell>
        </table:table-row>
        <table:table-row table:style-name="表格2.1">
          <table:table-cell table:style-name="表格2.A3" office:value-type="string">
            <text:p text:style-name="P16"><text:span text:style-name="T28">Heap</text:span></text:p>
          </table:table-cell>
          <table:table-cell table:style-name="表格2.A3" office:value-type="string">
            <text:p text:style-name="P17"><text:span text:style-name="T25">找最大 / 最小值</text:span></text:p>
          </table:table-cell>
          <table:table-cell table:style-name="表格2.A3" office:value-type="string">
            <text:p text:style-name="P17"><text:span text:style-name="T26">O(n)</text:span></text:p>
          </table:table-cell>
          <table:table-cell table:style-name="表格2.A3" office:value-type="string">
            <text:p text:style-name="P17"><text:span text:style-name="T25">O(log n)</text:span></text:p>
          </table:table-cell>
          <table:table-cell table:style-name="表格2.A3" office:value-type="string">
            <text:p text:style-name="P17"><text:span text:style-name="T25">O(log n)</text:span></text:p>
          </table:table-cell>
          <table:table-cell table:style-name="表格2.A3" office:value-type="string">
            <text:p text:style-name="P17"><text:span text:style-name="T25">O(log n)</text:span></text:p>
          </table:table-cell>
        </table:table-row>
        <table:table-row table:style-name="表格2.1">
          <table:table-cell table:style-name="表格2.A2" office:value-type="string">
            <text:p text:style-name="P16"><text:span text:style-name="T25">Hash Table</text:span></text:p>
          </table:table-cell>
          <table:table-cell table:style-name="表格2.A2" office:value-type="string">
            <text:p text:style-name="P17"><text:span text:style-name="T25">快速查詢（平均）</text:span></text:p>
          </table:table-cell>
          <table:table-cell table:style-name="表格2.A2" office:value-type="string">
            <text:p text:style-name="P17"><text:span text:style-name="T25">O(1) 平均</text:span></text:p>
          </table:table-cell>
          <table:table-cell table:style-name="表格2.A2" office:value-type="string">
            <text:p text:style-name="P17"><text:span text:style-name="T25">O(1) 平均</text:span></text:p>
          </table:table-cell>
          <table:table-cell table:style-name="表格2.A2" office:value-type="string">
            <text:p text:style-name="P17"><text:span text:style-name="T25">O(1) 平均</text:span></text:p>
          </table:table-cell>
          <table:table-cell table:style-name="表格2.A2" office:value-type="string">
            <text:p text:style-name="P17"><text:span text:style-name="T26">O(n)</text:span><text:span text:style-name="T27"> 碰撞</text:span></text:p>
          </table:table-cell>
        </table:table-row>
      </table:table>
      <text:p text:style-name="P18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9"><text:span text:style-name="T29">✅ </text:span><text:span text:style-name="T30">核心差異一句話記憶</text:span></text:p>
            <text:p text:style-name="P20"><text:span text:style-name="T31">BST：</text:span><text:span text:style-name="T32">左小右大，可能退化成 O(n)。</text:span></text:p>
            <text:p text:style-name="P20"><text:span text:style-name="T31">AVL：</text:span><text:span text:style-name="T32">強制平衡（BF 介於 −1～+1），查找最快。</text:span></text:p>
            <text:p text:style-name="P20"><text:span text:style-name="T31">RBT：</text:span><text:span text:style-name="T32">用紅黑規則維持平衡，插入/刪除旋轉次數少於 AVL。</text:span></text:p>
            <text:p text:style-name="P21"><text:span text:style-name="T31">Heap：</text:span><text:span text:style-name="T32">不是搜尋樹，專門快速取出最大值或最小值。</text:span></text:p>
          </table:table-cell>
        </table:table-row>
      </table:table>
      <text:p text:style-name="Standard"/>
      <text:h text:style-name="P12" text:outline-level="1"><text:span text:style-name="T18">第二章 <text:s/></text:span><text:span text:style-name="T19">為什麼都是 O(log n)？（深入理解）</text:span></text:h>
      <text:p text:style-name="P13"><text:span text:style-name="T20">很多初學者看到 BST、AVL、RBT、Heap 的時間複雜度都是 O(log n)，直覺認為「應該都是每次砍掉一半吧？」這個想法非常接近核心，但其實 </text:span><text:span text:style-name="T21">Heap 的 O(log n) 來源跟前三者完全不同</text:span><text:span text:style-name="T20">。釐清這點，後面所有觀念都會變簡單。</text:span></text:p>
      <text:h text:style-name="P14" text:outline-level="2"><text:span text:style-name="T22">▍</text:span><text:span text:style-name="T23">2.1　三種結構的從屬關係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9"><text:span text:style-name="T29">⚠️ </text:span><text:span text:style-name="T33">先記住這個關鍵分類</text:span></text:p>
            <text:p text:style-name="P20"><text:span text:style-name="T34">AVL、RBT 都「是」BST</text:span><text:span text:style-name="T32">（在 BST 上加平衡規則）。</text:span></text:p>
            <text:p text:style-name="P21"><text:span text:style-name="T34">Heap 不是 BST！</text:span><text:span text:style-name="T32"> 它是另一條路線（完全二元樹 + 父子大小規則）。</text:span></text:p>
          </table:table-cell>
        </table:table-row>
      </table:table>
      <text:p text:style-name="P22"/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header-rows>
          <table:table-row table:style-name="表格5.1">
            <table:table-cell table:style-name="表格5.A1" office:value-type="string">
              <text:p text:style-name="P15"><text:span text:style-name="T24">結構</text:span></text:p>
            </table:table-cell>
            <table:table-cell table:style-name="表格5.A1" office:value-type="string">
              <text:p text:style-name="P15"><text:span text:style-name="T24">是 BST 嗎？</text:span></text:p>
            </table:table-cell>
            <table:table-cell table:style-name="表格5.A1" office:value-type="string">
              <text:p text:style-name="P15"><text:span text:style-name="T24">判斷依據</text:span></text:p>
            </table:table-cell>
            <table:table-cell table:style-name="表格5.A1" office:value-type="string">
              <text:p text:style-name="P15"><text:span text:style-name="T24">O(log n) 的來源</text:span>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16"><text:span text:style-name="T25">BST</text:span></text:p>
          </table:table-cell>
          <table:table-cell table:style-name="表格5.A2" office:value-type="string">
            <text:p text:style-name="P16"><text:span text:style-name="T35">✓ 是</text:span></text:p>
          </table:table-cell>
          <table:table-cell table:style-name="表格5.A2" office:value-type="string">
            <text:p text:style-name="P16"><text:span text:style-name="T25">左 &lt; 根 &lt; 右</text:span></text:p>
          </table:table-cell>
          <table:table-cell table:style-name="表格5.A2" office:value-type="string">
            <text:p text:style-name="P16"><text:span text:style-name="T25">平衡時每層排除約一半節點</text:span></text:p>
          </table:table-cell>
        </table:table-row>
        <table:table-row table:style-name="表格5.1">
          <table:table-cell table:style-name="表格5.A3" office:value-type="string">
            <text:p text:style-name="P16"><text:span text:style-name="T25">AVL Tree</text:span></text:p>
          </table:table-cell>
          <table:table-cell table:style-name="表格5.A3" office:value-type="string">
            <text:p text:style-name="P16"><text:span text:style-name="T35">✓ 是</text:span></text:p>
          </table:table-cell>
          <table:table-cell table:style-name="表格5.A3" office:value-type="string">
            <text:p text:style-name="P16"><text:span text:style-name="T25">BST 規則 + │BF│ ≤ 1</text:span></text:p>
          </table:table-cell>
          <table:table-cell table:style-name="表格5.A3" office:value-type="string">
            <text:p text:style-name="P16"><text:span text:style-name="T25">BST 搜尋 + 強制平衡不退化</text:span></text:p>
          </table:table-cell>
        </table:table-row>
        <table:table-row table:style-name="表格5.1">
          <table:table-cell table:style-name="表格5.A2" office:value-type="string">
            <text:p text:style-name="P16"><text:span text:style-name="T25">Red-Black Tree</text:span></text:p>
          </table:table-cell>
          <table:table-cell table:style-name="表格5.A2" office:value-type="string">
            <text:p text:style-name="P16"><text:span text:style-name="T35">✓ 是</text:span></text:p>
          </table:table-cell>
          <table:table-cell table:style-name="表格5.A2" office:value-type="string">
            <text:p text:style-name="P16"><text:span text:style-name="T25">BST 規則 + 五條顏色規則</text:span></text:p>
          </table:table-cell>
          <table:table-cell table:style-name="表格5.A2" office:value-type="string">
            <text:p text:style-name="P16"><text:span text:style-name="T25">BST 搜尋 + 顏色規則保證高度 ≤ 2log(n+1)</text:span></text:p>
          </table:table-cell>
        </table:table-row>
        <table:table-row table:style-name="表格5.1">
          <table:table-cell table:style-name="表格5.A3" office:value-type="string">
            <text:p text:style-name="P16"><text:span text:style-name="T28">Heap</text:span></text:p>
          </table:table-cell>
          <table:table-cell table:style-name="表格5.A3" office:value-type="string">
            <text:p text:style-name="P16"><text:span text:style-name="T26">✗ 不是！</text:span></text:p>
          </table:table-cell>
          <table:table-cell table:style-name="表格5.A3" office:value-type="string">
            <text:p text:style-name="P16"><text:span text:style-name="T25">只要求父 ≥ 子（或父 ≤ 子）</text:span></text:p>
          </table:table-cell>
          <table:table-cell table:style-name="表格5.A3" office:value-type="string">
            <text:p text:style-name="P16"><text:span text:style-name="T25">完全二元樹高度 = O(log n)，只沿樹高移動</text:span></text:p>
          </table:table-cell>
        </table:table-row>
      </table:table>
      <text:p text:style-name="P23"/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9"><text:span text:style-name="T29">💡 </text:span><text:span text:style-name="T36">為什麼 Heap 不是 BST？（看一眼就懂）</text:span></text:p>
            <text:p text:style-name="P20"><text:span text:style-name="T37">BST</text:span><text:span text:style-name="T32"> 要求「左子樹所有節點 &lt; 根 &lt; 右子樹所有節點」，管的是</text:span><text:span text:style-name="T37">節點間大小關係</text:span><text:span text:style-name="T32">。</text:span></text:p>
            <text:p text:style-name="P20"><text:span text:style-name="T37">Heap</text:span><text:span text:style-name="T32"> 只要求「父 ≥（或 ≤）子」，</text:span><text:span text:style-name="T37">兄弟之間完全沒有大小限制</text:span><text:span text:style-name="T32">。下面是合法 Max Heap，卻不是 BST：</text:span></text:p>
            <text:p text:style-name="P24"><text:span text:style-name="T38"><text:s text:c="8"/>100</text:span></text:p>
            <text:p text:style-name="P24"><text:span text:style-name="T38"><text:s text:c="7"/>/ <text:s text:c="2"/>\</text:span></text:p>
            <text:p text:style-name="P24"><text:span text:style-name="T38"><text:s text:c="6"/>80 <text:s text:c="3"/>70 <text:s text:c="3"/>← 80、70 之間沒有大小限制（Heap 合法）</text:span></text:p>
            <text:p text:style-name="P24"><text:span text:style-name="T38"><text:s text:c="5"/>/ <text:s/>\</text:span></text:p>
            <text:p text:style-name="P24"><text:span text:style-name="T38"><text:s text:c="4"/>20 <text:s text:c="2"/>40 <text:s text:c="6"/>← 70 在根的右邊卻 70 &lt; 100（BST 不允許）</text:span></text:p>
            <text:p text:style-name="P21"><text:span text:style-name="T37">結論：BST 管「大小關係」，Heap 管「父子關係」，兩者根本不同。</text:span></text:p>
          </table:table-cell>
        </table:table-row>
      </table:table>
      <text:h text:style-name="P14" text:outline-level="2"><text:span text:style-name="T22">▍</text:span><text:span text:style-name="T23">2.2　BST / AVL / RBT 的 O(log n)：每次排除半棵樹</text:span></text:h>
      <text:p text:style-name="P13"><text:span text:style-name="T20">搜尋時，BST 的「左 &lt; 根 &lt; 右」規則讓</text:span><text:span text:style-name="T21">每次比較都能排除整整一半的節點</text:span><text:span text:style-name="T20">，原理和</text:span><text:span text:style-name="T21">二元搜尋（Binary Search）完全相同</text:span><text:span text:style-name="T20">：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5"><text:span text:style-name="T39">搜尋 70 的過程：</text:span></text:p>
            <text:p text:style-name="P25"><text:span text:style-name="T39"><text:s text:c="8"/>50 <text:s text:c="9"/>← 70 &gt; 50，排除左半邊（含 30,20,40）</text:span></text:p>
            <text:p text:style-name="P25"><text:span text:style-name="T39"><text:s text:c="7"/>/ <text:s/>\</text:span></text:p>
            <text:p text:style-name="P25"><text:span text:style-name="T39"><text:s text:c="5"/>30 <text:s text:c="3"/>80 <text:s text:c="6"/>← 70 &lt; 80，排除右半邊（含 90）</text:span></text:p>
            <text:p text:style-name="P25"><text:span text:style-name="T39"><text:s text:c="4"/>/ \ <text:s text:c="2"/>/ \</text:span></text:p>
            <text:p text:style-name="P25"><text:span text:style-name="T39"><text:s text:c="3"/>20 40 70 <text:s/>90 <text:s text:c="4"/>← 找到！</text:span></text:p>
            <text:p text:style-name="P25"><text:soft-page-break/><text:span text:style-name="T39"><text:s/></text:span></text:p>
            <text:p text:style-name="P25"><text:span text:style-name="T39">每一步都把搜尋範圍縮小一半 → 高度 = O(log n)，搜尋 = O(log n)</text:span></text:p>
          </table:table-cell>
        </table:table-row>
      </table:table>
      <text:p text:style-name="P26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9"><text:span text:style-name="T29">⭐ </text:span><text:span text:style-name="T40">AVL 與 RBT 的關鍵價值</text:span></text:p>
            <text:p text:style-name="P20"><text:span text:style-name="T32">普通 BST 若</text:span><text:span text:style-name="T41">資料有序插入</text:span><text:span text:style-name="T32">（如 1,2,3,4…）會退化成右斜鏈結串列，搜尋變 </text:span><text:span text:style-name="T41">O(n)</text:span><text:span text:style-name="T32">。</text:span></text:p>
            <text:p text:style-name="P21"><text:span text:style-name="T32">AVL、RBT 透過各自的平衡機制保證樹不退化，</text:span><text:span text:style-name="T41">讓「每次排除半棵樹」的前提永遠成立</text:span><text:span text:style-name="T32">，搜尋始終維持 </text:span><text:span text:style-name="T41">O(log n)</text:span><text:span text:style-name="T32">。</text:span></text:p>
          </table:table-cell>
        </table:table-row>
      </table:table>
      <text:h text:style-name="P14" text:outline-level="2"><text:span text:style-name="T22">▍</text:span><text:span text:style-name="T23">2.3　Heap 的 O(log n)：來自完全二元樹的高度</text:span></text:h>
      <text:p text:style-name="P13"><text:span text:style-name="T21">Heap 的 O(log n) 有完全不同的來源</text:span><text:span text:style-name="T20">：不是「每次排除半棵樹資料」，而是</text:span><text:span text:style-name="T21">「樹本身的高度剛好是 log n」</text:span><text:span text:style-name="T20">。</text:span></text:p>
      <table:table table:name="表格9" table:style-name="表格9">
        <table:table-column table:style-name="表格9.A"/>
        <table:table-column table:style-name="表格9.B"/>
        <table:table-column table:style-name="表格9.C"/>
        <table:table-header-rows>
          <table:table-row table:style-name="表格9.1">
            <table:table-cell table:style-name="表格9.A1" office:value-type="string">
              <text:p text:style-name="P15"><text:span text:style-name="T24">操作</text:span></text:p>
            </table:table-cell>
            <table:table-cell table:style-name="表格9.A1" office:value-type="string">
              <text:p text:style-name="P15"><text:span text:style-name="T24">過程</text:span></text:p>
            </table:table-cell>
            <table:table-cell table:style-name="表格9.A1" office:value-type="string">
              <text:p text:style-name="P15"><text:span text:style-name="T24">為什麼是 O(log n)？</text:span></text:p>
            </table:table-cell>
          </table:table-row>
        </table:table-header-rows>
        <table:table-row table:style-name="表格9.1">
          <table:table-cell table:style-name="表格9.A2" office:value-type="string">
            <text:p text:style-name="P16"><text:span text:style-name="T25">插入（Up-Heap）</text:span></text:p>
          </table:table-cell>
          <table:table-cell table:style-name="表格9.A2" office:value-type="string">
            <text:p text:style-name="P16"><text:span text:style-name="T25">新元素放最後 → 與父比較 → 違規則就往上換，重複到合法</text:span></text:p>
          </table:table-cell>
          <table:table-cell table:style-name="表格9.A2" office:value-type="string">
            <text:p text:style-name="P16"><text:span text:style-name="T25">最多往上走「樹高」層，樹高 = log n</text:span></text:p>
          </table:table-cell>
        </table:table-row>
        <table:table-row table:style-name="表格9.1">
          <table:table-cell table:style-name="表格9.A3" office:value-type="string">
            <text:p text:style-name="P16"><text:span text:style-name="T25">刪除最大值（Down-Heap）</text:span></text:p>
          </table:table-cell>
          <table:table-cell table:style-name="表格9.A3" office:value-type="string">
            <text:p text:style-name="P16"><text:span text:style-name="T25">移除根 → 末端元素移到根 → 與較大子比較 → 違規則就往下換</text:span></text:p>
          </table:table-cell>
          <table:table-cell table:style-name="表格9.A3" office:value-type="string">
            <text:p text:style-name="P16"><text:span text:style-name="T25">最多往下走「樹高」層，樹高 = log n</text:span></text:p>
          </table:table-cell>
        </table:table-row>
      </table:table>
      <text:p text:style-name="P23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9"><text:span text:style-name="T29">💡 </text:span><text:span text:style-name="T36">完全二元樹的高度為什麼是 log n？</text:span></text:p>
            <text:p text:style-name="P20"><text:span text:style-name="T32">完全二元樹每一層的節點數恰好是上一層的兩倍：</text:span></text:p>
            <text:p text:style-name="P24"><text:span text:style-name="T38"><text:s text:c="2"/>第 1 層：1 個 <text:s text:c="5"/>第 2 層：2 個 <text:s text:c="5"/>第 3 層：4 個 …</text:span></text:p>
            <text:p text:style-name="P24"><text:span text:style-name="T38"><text:s text:c="2"/>第 h 層：2^(h-1) 個 <text:s text:c="5"/>總計：2^h − 1 ≈ n</text:span></text:p>
            <text:p text:style-name="P24"><text:span text:style-name="T38"><text:s text:c="2"/>→ h ≈ log₂(n)</text:span></text:p>
            <text:p text:style-name="P21"><text:span text:style-name="T32">因此 Up-Heap / Down-Heap 最多走 log n 步，時間複雜度 O(log n)。</text:span></text:p>
          </table:table-cell>
        </table:table-row>
      </table:table>
      <text:h text:style-name="P14" text:outline-level="2"><text:span text:style-name="T22">▍</text:span><text:span text:style-name="T23">2.4　完全二元樹 ≠ BST（重要觀念辨別）</text:span></text:h>
      <text:p text:style-name="P13"><text:span text:style-name="T20">「完全二元樹」和「BST」是兩個</text:span><text:span text:style-name="T21">完全獨立</text:span><text:span text:style-name="T20">的概念，描述的是不同的事情：</text:span>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header-rows>
          <table:table-row table:style-name="表格11.1">
            <table:table-cell table:style-name="表格11.A1" office:value-type="string">
              <text:p text:style-name="P15"><text:span text:style-name="T24">概念</text:span></text:p>
            </table:table-cell>
            <table:table-cell table:style-name="表格11.A1" office:value-type="string">
              <text:p text:style-name="P15"><text:span text:style-name="T24">管什麼？</text:span></text:p>
            </table:table-cell>
            <table:table-cell table:style-name="表格11.A1" office:value-type="string">
              <text:p text:style-name="P15"><text:span text:style-name="T24">規則</text:span></text:p>
            </table:table-cell>
            <table:table-cell table:style-name="表格11.A1" office:value-type="string">
              <text:p text:style-name="P15"><text:span text:style-name="T24">目的</text:span></text:p>
            </table:table-cell>
          </table:table-row>
        </table:table-header-rows>
        <table:table-row table:style-name="表格11.1">
          <table:table-cell table:style-name="表格11.A2" office:value-type="string">
            <text:p text:style-name="P16"><text:span text:style-name="T28">BST</text:span></text:p>
          </table:table-cell>
          <table:table-cell table:style-name="表格11.A2" office:value-type="string">
            <text:p text:style-name="P16"><text:span text:style-name="T25">節點的大小關係</text:span></text:p>
          </table:table-cell>
          <table:table-cell table:style-name="表格11.A2" office:value-type="string">
            <text:p text:style-name="P16"><text:span text:style-name="T25">左子樹 &lt; 根 &lt; 右子樹</text:span></text:p>
          </table:table-cell>
          <table:table-cell table:style-name="表格11.A2" office:value-type="string">
            <text:p text:style-name="P16"><text:span text:style-name="T25">快速搜尋任意值</text:span></text:p>
          </table:table-cell>
        </table:table-row>
        <table:table-row table:style-name="表格11.1">
          <table:table-cell table:style-name="表格11.A3" office:value-type="string">
            <text:p text:style-name="P16"><text:span text:style-name="T28">完全二元樹</text:span></text:p>
          </table:table-cell>
          <table:table-cell table:style-name="表格11.A3" office:value-type="string">
            <text:p text:style-name="P16"><text:span text:style-name="T25">樹的形狀</text:span></text:p>
          </table:table-cell>
          <table:table-cell table:style-name="表格11.A3" office:value-type="string">
            <text:p text:style-name="P16"><text:span text:style-name="T25">最後一層之外填滿，最後一層由左到右依序填</text:span></text:p>
          </table:table-cell>
          <table:table-cell table:style-name="表格11.A3" office:value-type="string">
            <text:p text:style-name="P16"><text:span text:style-name="T25">可用陣列高效儲存</text:span></text:p>
          </table:table-cell>
        </table:table-row>
      </table:table>
      <text:p text:style-name="P27"/>
      <text:p text:style-name="P13"><text:span text:style-name="T20">兩者是獨立條件，可任意組合，共四種可能：</text:span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5"><text:span text:style-name="T39">① BST，非完全 <text:s text:c="9"/>② 完全，非 BST <text:s text:c="7"/>③ 兩者都是 <text:s text:c="10"/>④ 都不是</text:span></text:p>
            <text:p text:style-name="P25"><text:span text:style-name="T39"><text:s text:c="5"/>50 <text:s text:c="19"/>100 <text:s text:c="18"/>50 <text:s text:c="16"/>50</text:span></text:p>
            <text:p text:style-name="P25"><text:span text:style-name="T39"><text:s text:c="4"/>/ <text:s/>\ <text:s text:c="17"/>/ <text:s text:c="2"/>\ <text:s text:c="15"/>/ <text:s/>\ <text:s text:c="17"/>\</text:span></text:p>
            <text:p text:style-name="P25"><text:span text:style-name="T39"><text:s text:c="3"/>30 <text:s text:c="2"/>80 <text:s text:c="14"/>80 <text:s text:c="3"/>70 <text:s text:c="12"/>30 <text:s text:c="2"/>80 <text:s text:c="14"/>80</text:span></text:p>
            <text:p text:style-name="P25"><text:span text:style-name="T39"><text:s text:c="5"/>\ <text:s text:c="39"/>/\ <text:s text:c="2"/>/</text:span></text:p>
            <text:p text:style-name="P25"><text:soft-page-break/><text:span text:style-name="T39"><text:s text:c="6"/>40 <text:s text:c="36"/>20 40 70</text:span></text:p>
            <text:p text:style-name="P25"><text:span text:style-name="T39"><text:s/>✓BST ✗完全 <text:s text:c="13"/>✓完全 ✗BST <text:s text:c="10"/>✓BST ✓完全 <text:s text:c="9"/>✗BST ✗完全</text:span></text:p>
          </table:table-cell>
        </table:table-row>
      </table:table>
      <text:p text:style-name="P27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9"><text:span text:style-name="T29">🔑 </text:span><text:span text:style-name="T30">口訣：四種結構一句話定位</text:span></text:p>
            <text:p text:style-name="P20"><text:span text:style-name="T31">BST</text:span><text:span text:style-name="T32"> 管大小（左 &lt; 根 &lt; 右）；</text:span><text:span text:style-name="T31">Complete Binary Tree</text:span><text:span text:style-name="T32"> 管形狀（從左到右填滿）。</text:span></text:p>
            <text:p text:style-name="P20"><text:span text:style-name="T31">Heap</text:span><text:span text:style-name="T32"> = 完全二元樹 ＋ 父子大小規則（父 ≥ 子 或 父 ≤ 子）。</text:span></text:p>
            <text:p text:style-name="P20"><text:span text:style-name="T31">AVL</text:span><text:span text:style-name="T32"> = BST ＋ 平衡規則（│BF│ ≤ 1）。</text:span></text:p>
            <text:p text:style-name="P21"><text:span text:style-name="T31">RBT</text:span><text:span text:style-name="T32"> = BST ＋ 顏色規則（五條）。</text:span></text:p>
          </table:table-cell>
        </table:table-row>
      </table:table>
      <text:h text:style-name="P14" text:outline-level="2"><text:span text:style-name="T22">▍</text:span><text:span text:style-name="T23">2.5　O(log n) 來源總結對照表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header-rows>
          <table:table-row table:style-name="表格14.1">
            <table:table-cell table:style-name="表格14.A1" office:value-type="string">
              <text:p text:style-name="P15"><text:span text:style-name="T24">結構</text:span></text:p>
            </table:table-cell>
            <table:table-cell table:style-name="表格14.A1" office:value-type="string">
              <text:p text:style-name="P15"><text:span text:style-name="T24">O(log n) 的來源</text:span></text:p>
            </table:table-cell>
            <table:table-cell table:style-name="表格14.A1" office:value-type="string">
              <text:p text:style-name="P15"><text:span text:style-name="T24">生活類比</text:span>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16"><text:span text:style-name="T25">BST（平衡時）</text:span></text:p>
          </table:table-cell>
          <table:table-cell table:style-name="表格14.A2" office:value-type="string">
            <text:p text:style-name="P16"><text:span text:style-name="T25">每次搜尋排除半棵樹（利用左&lt;根&lt;右）</text:span></text:p>
          </table:table-cell>
          <table:table-cell table:style-name="表格14.A2" office:value-type="string">
            <text:p text:style-name="P16"><text:span text:style-name="T25">翻電話簿，每次翻中間排除一半</text:span></text:p>
          </table:table-cell>
        </table:table-row>
        <table:table-row table:style-name="表格14.1">
          <table:table-cell table:style-name="表格14.A3" office:value-type="string">
            <text:p text:style-name="P16"><text:span text:style-name="T25">AVL Tree</text:span></text:p>
          </table:table-cell>
          <table:table-cell table:style-name="表格14.A3" office:value-type="string">
            <text:p text:style-name="P16"><text:span text:style-name="T25">同 BST，加上強制平衡確保不退化</text:span></text:p>
          </table:table-cell>
          <table:table-cell table:style-name="表格14.A3" office:value-type="string">
            <text:p text:style-name="P16"><text:span text:style-name="T25">同上，多了「強迫整齊」的規則</text:span></text:p>
          </table:table-cell>
        </table:table-row>
        <table:table-row table:style-name="表格14.1">
          <table:table-cell table:style-name="表格14.A2" office:value-type="string">
            <text:p text:style-name="P16"><text:span text:style-name="T25">Red-Black Tree</text:span></text:p>
          </table:table-cell>
          <table:table-cell table:style-name="表格14.A2" office:value-type="string">
            <text:p text:style-name="P16"><text:span text:style-name="T25">同 BST，加上顏色規則確保不退化</text:span></text:p>
          </table:table-cell>
          <table:table-cell table:style-name="表格14.A2" office:value-type="string">
            <text:p text:style-name="P16"><text:span text:style-name="T25">同上，用「顏色限制」代替嚴格整齊</text:span></text:p>
          </table:table-cell>
        </table:table-row>
        <table:table-row table:style-name="表格14.1">
          <table:table-cell table:style-name="表格14.A3" office:value-type="string">
            <text:p text:style-name="P16"><text:span text:style-name="T25">Heap（插入/刪除）</text:span></text:p>
          </table:table-cell>
          <table:table-cell table:style-name="表格14.A3" office:value-type="string">
            <text:p text:style-name="P16"><text:span text:style-name="T25">完全二元樹高度 = log n，最多走樹高步</text:span></text:p>
          </table:table-cell>
          <table:table-cell table:style-name="表格14.A3" office:value-type="string">
            <text:p text:style-name="P16"><text:span text:style-name="T25">爬樓梯，樓層數 = log n</text:span></text:p>
          </table:table-cell>
        </table:table-row>
      </table:table>
      <text:p text:style-name="Standard"/>
      <text:h text:style-name="P12" text:outline-level="1"><text:span text:style-name="T18">第三章 <text:s/></text:span><text:span text:style-name="T19">BST（Binary Search Tree）二元搜尋樹</text:span></text:h>
      <text:h text:style-name="P14" text:outline-level="2"><text:span text:style-name="T22">▍</text:span><text:span text:style-name="T23">3.1　基本規則</text:span></text:h>
      <text:p text:style-name="P13"><text:span text:style-name="T21">BST 的核心原則：</text:span><text:span text:style-name="T20">對任意節點而言，</text:span><text:span text:style-name="T21">左子樹所有節點 &lt; 該節點 &lt; 右子樹所有節點</text:span><text:span text:style-name="T20">。其中序走訪（Inorder）結果剛好是由小到大的排序序列。</text:span>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5"><text:span text:style-name="T39">範例樹（中序走訪 = 20 30 40 50 70 80 90，已排序）</text:span></text:p>
            <text:p text:style-name="P25"><text:span text:style-name="T39"><text:s text:c="8"/>50</text:span></text:p>
            <text:p text:style-name="P25"><text:span text:style-name="T39"><text:s text:c="7"/>/ <text:s/>\</text:span></text:p>
            <text:p text:style-name="P25"><text:span text:style-name="T39"><text:s text:c="5"/>30 <text:s text:c="3"/>80</text:span></text:p>
            <text:p text:style-name="P25"><text:span text:style-name="T39"><text:s text:c="4"/>/ \ <text:s text:c="2"/>/ \</text:span></text:p>
            <text:p text:style-name="P25"><text:span text:style-name="T39"><text:s text:c="3"/>20 40 70 90</text:span></text:p>
          </table:table-cell>
        </table:table-row>
      </table:table>
      <text:h text:style-name="P14" text:outline-level="2"><text:span text:style-name="T22">▍</text:span><text:span text:style-name="T23">3.2　插入操作</text:span></text:h>
      <text:p text:style-name="P13"><text:span text:style-name="T21">插入規則：</text:span><text:span text:style-name="T20">從根開始比較，小於往左走，大於往右走，直到找到空位後插入。</text:span></text:p>
      <text:p text:style-name="P13"><text:span text:style-name="T21">範例：</text:span><text:span text:style-name="T20">將 35 插入上方樹</text:span></text:p>
      <text:list text:style-name="WWNum2">
        <text:list-item text:start-value="1">
          <text:p text:style-name="P28"><text:span text:style-name="T20">35 &lt; 50 → 往左走</text:span></text:p>
        </text:list-item>
        <text:list-item>
          <text:p text:style-name="P28"><text:span text:style-name="T20">35 &gt; 30 → 往右走</text:span></text:p>
        </text:list-item>
        <text:list-item>
          <text:p text:style-name="P28"><text:span text:style-name="T20">35 &lt; 40 → 往左走</text:span></text:p>
        </text:list-item>
        <text:list-item>
          <text:p text:style-name="P28"><text:span text:style-name="T20">到達空位，插入 35</text:span></text:p>
        </text:list-item>
      </text:list>
      <text:h text:style-name="P14" text:outline-level="2"><text:span text:style-name="T22">▍</text:span><text:span text:style-name="T23">3.3　刪除操作（考試重點！）</text:span></text:h>
      <text:p text:style-name="P13"><text:span text:style-name="T21">共分三種情況，必須熟記：</text:span></text:p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15"><text:span text:style-name="T24">情況</text:span></text:p>
            </table:table-cell>
            <table:table-cell table:style-name="表格16.A1" office:value-type="string">
              <text:p text:style-name="P15"><text:span text:style-name="T24">條件</text:span></text:p>
            </table:table-cell>
            <table:table-cell table:style-name="表格16.A1" office:value-type="string">
              <text:p text:style-name="P15"><text:span text:style-name="T24">處理方式</text:span>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16"><text:span text:style-name="T42">① 葉節點</text:span></text:p>
          </table:table-cell>
          <table:table-cell table:style-name="表格16.A2" office:value-type="string">
            <text:p text:style-name="P16"><text:span text:style-name="T25">無任何子節點</text:span></text:p>
          </table:table-cell>
          <table:table-cell table:style-name="表格16.A2" office:value-type="string">
            <text:p text:style-name="P16"><text:span text:style-name="T25">直接刪除</text:span></text:p>
          </table:table-cell>
        </table:table-row>
        <table:table-row table:style-name="表格16.1">
          <table:table-cell table:style-name="表格16.A3" office:value-type="string">
            <text:p text:style-name="P16"><text:span text:style-name="T42">② 一個子節點</text:span></text:p>
          </table:table-cell>
          <table:table-cell table:style-name="表格16.A3" office:value-type="string">
            <text:p text:style-name="P16"><text:span text:style-name="T25">只有左子樹或右子樹</text:span></text:p>
          </table:table-cell>
          <table:table-cell table:style-name="表格16.A3" office:value-type="string">
            <text:p text:style-name="P16"><text:span text:style-name="T25">讓唯一的子節點直接接替被刪節點的位置</text:span></text:p>
          </table:table-cell>
        </table:table-row>
        <table:table-row table:style-name="表格16.1">
          <table:table-cell table:style-name="表格16.A2" office:value-type="string">
            <text:p text:style-name="P16"><text:span text:style-name="T27">③ 兩個子節點</text:span></text:p>
          </table:table-cell>
          <table:table-cell table:style-name="表格16.A2" office:value-type="string">
            <text:p text:style-name="P16"><text:span text:style-name="T25">左右子樹皆存在</text:span></text:p>
          </table:table-cell>
          <table:table-cell table:style-name="表格16.A2" office:value-type="string">
            <text:p text:style-name="P16"><text:span text:style-name="T25">找</text:span><text:span text:style-name="T28">中序後繼</text:span><text:span text:style-name="T25">（右子樹最小值）替換，再刪去後繼節點</text:span></text:p>
          </table:table-cell>
        </table:table-row>
      </table:table>
      <text:p text:style-name="P23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19"><text:span text:style-name="T29">🔑 </text:span><text:span text:style-name="T30">口訣：BST 刪除三句話</text:span></text:p>
            <text:p text:style-name="P20"><text:span text:style-name="T31">葉節點 → 直接刪。</text:span></text:p>
            <text:p text:style-name="P20"><text:span text:style-name="T31">一個子 → 子接上。</text:span></text:p>
            <text:p text:style-name="P21"><text:span text:style-name="T31">兩個子 → 找右子樹最小值（中序後繼）來替換。</text:span></text:p>
          </table:table-cell>
        </table:table-row>
      </table:table>
      <text:h text:style-name="P29" text:outline-level="3"><text:span text:style-name="T43">為什麼刪 30 要找「右子樹最小值 40」來替換？完整推導</text:span></text:h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5"><text:span text:style-name="T39">原始樹： <text:s text:c="16"/>50</text:span></text:p>
            <text:p text:style-name="P25"><text:span text:style-name="T39"><text:s text:c="24"/>/ <text:s/>\</text:span></text:p>
            <text:p text:style-name="P25"><text:soft-page-break/><text:span text:style-name="T39"><text:s text:c="22"/>30 <text:s text:c="3"/>80 <text:s text:c="5"/>← 要刪 30（左右子都在 → 情況③）</text:span></text:p>
            <text:p text:style-name="P25"><text:span text:style-name="T39"><text:s text:c="21"/>/ \ <text:s text:c="2"/>/ \</text:span></text:p>
            <text:p text:style-name="P25"><text:span text:style-name="T39"><text:s text:c="20"/>20 40 70 90</text:span></text:p>
          </table:table-cell>
        </table:table-row>
        <table:table-row table:style-name="表格18.1">
          <table:table-cell table:style-name="表格18.A2" office:value-type="string">
            <text:p text:style-name="P19"><text:span text:style-name="T29">💡 </text:span><text:span text:style-name="T36">Step by step：填進來的值要滿足什麼條件？</text:span></text:p>
            <text:p text:style-name="P20"><text:span text:style-name="T37">Step 1．</text:span><text:span text:style-name="T32"> 30 的左子是 20、右子是 40，兩側都有 → 屬情況③，不能直接刪。</text:span></text:p>
            <text:p text:style-name="P20"><text:span text:style-name="T37">Step 2．</text:span><text:span text:style-name="T32"> 刪掉 30 後，填進來的新值必須同時：　(A) 大於左子樹所有節點（&gt; 20）　(B) 小於父節點 50（&lt; 50）。換句話說，要夾在 20 和 50 之間。</text:span></text:p>
            <text:p text:style-name="P20"><text:span text:style-name="T37">Step 3．</text:span><text:span text:style-name="T32"> 把整棵樹由小到大排（中序）：　20 → </text:span><text:span text:style-name="T37">30(被刪)</text:span><text:span text:style-name="T32"> → </text:span><text:span text:style-name="T37">40(下一個!)</text:span><text:span text:style-name="T32"> → 50 → 70 → 80 → 90。30 的下一個就是 </text:span><text:span text:style-name="T37">40</text:span><text:span text:style-name="T32">，這叫</text:span><text:span text:style-name="T37">中序後繼（Inorder Successor）</text:span><text:span text:style-name="T32">，天然滿足 (A)(B)。</text:span></text:p>
            <text:p text:style-name="P20"><text:span text:style-name="T37">Step 4．</text:span><text:span text:style-name="T32"> 快速找法（免走整棵樹）：</text:span><text:span text:style-name="T37">中序後繼 = 被刪節點「右子樹中最左下角（最小）」的節點</text:span><text:span text:style-name="T32">。30 的右子樹只有 40，所以後繼就是 40。</text:span></text:p>
            <text:p text:style-name="P21"><text:span text:style-name="T37">Step 5．</text:span><text:span text:style-name="T32"> 用 40 替換 30，結果仍滿足 20 &lt; 40 &lt; 50，BST 合法 ✓。</text:span></text:p>
          </table:table-cell>
        </table:table-row>
      </table:table>
      <text:p text:style-name="P22"/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5"><text:span text:style-name="T39">刪除前 <text:s text:c="25"/>刪除後（40 替換 30）</text:span></text:p>
            <text:p text:style-name="P25"><text:span text:style-name="T39"><text:s text:c="8"/>50 <text:s text:c="29"/>50</text:span></text:p>
            <text:p text:style-name="P25"><text:span text:style-name="T39"><text:s text:c="7"/>/ <text:s/>\ <text:s text:c="27"/>/ <text:s/>\</text:span></text:p>
            <text:p text:style-name="P25"><text:span text:style-name="T39"><text:s text:c="5"/>30 <text:s text:c="3"/>80 <text:s text:c="4"/>← 刪 30 <text:s text:c="11"/>40 <text:s text:c="3"/>80 <text:s text:c="4"/>← 40 接替 30</text:span></text:p>
            <text:p text:style-name="P25"><text:span text:style-name="T39"><text:s text:c="4"/>/ \ <text:s text:c="2"/>/ \ <text:s text:c="22"/>/ <text:s text:c="4"/>/ \</text:span></text:p>
            <text:p text:style-name="P25"><text:span text:style-name="T39"><text:s text:c="3"/>20 40 70 90 <text:s text:c="20"/>20 <text:s text:c="3"/>70 90 <text:s text:c="3"/>← 原 40 的位置空出</text:span></text:p>
          </table:table-cell>
        </table:table-row>
      </table:table>
      <text:p text:style-name="P26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9"><text:span text:style-name="T29">⭐ </text:span><text:span text:style-name="T40">中序後繼（Inorder Successor）定義</text:span></text:p>
            <text:p text:style-name="P20"><text:span text:style-name="T41">右子樹中值最小的節點</text:span><text:span text:style-name="T32">（即右子樹最左下角的節點）。</text:span></text:p>
            <text:p text:style-name="P21"><text:span text:style-name="T32">作用：在「兩個子節點」情況下，以中序後繼替換被刪節點，可維持 BST 性質。</text:span></text:p>
          </table:table-cell>
        </table:table-row>
      </table:table>
      <text:h text:style-name="P14" text:outline-level="2"><text:span text:style-name="T22">▍</text:span><text:span text:style-name="T23">3.4　時間複雜度分析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15"><text:span text:style-name="T24">操作</text:span></text:p>
            </table:table-cell>
            <table:table-cell table:style-name="表格21.A1" office:value-type="string">
              <text:p text:style-name="P15"><text:span text:style-name="T24">平均情況</text:span></text:p>
            </table:table-cell>
            <table:table-cell table:style-name="表格21.A1" office:value-type="string">
              <text:p text:style-name="P15"><text:span text:style-name="T24">最差情況（退化）</text:span>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16"><text:span text:style-name="T25">搜尋</text:span></text:p>
          </table:table-cell>
          <table:table-cell table:style-name="表格21.A2" office:value-type="string">
            <text:p text:style-name="P17"><text:span text:style-name="T25">O(log n)</text:span></text:p>
          </table:table-cell>
          <table:table-cell table:style-name="表格21.A2" office:value-type="string">
            <text:p text:style-name="P17"><text:span text:style-name="T27">O(n)</text:span></text:p>
          </table:table-cell>
        </table:table-row>
        <table:table-row table:style-name="表格21.1">
          <table:table-cell table:style-name="表格21.A3" office:value-type="string">
            <text:p text:style-name="P16"><text:span text:style-name="T25">插入</text:span></text:p>
          </table:table-cell>
          <table:table-cell table:style-name="表格21.A3" office:value-type="string">
            <text:p text:style-name="P17"><text:span text:style-name="T25">O(log n)</text:span></text:p>
          </table:table-cell>
          <table:table-cell table:style-name="表格21.A3" office:value-type="string">
            <text:p text:style-name="P17"><text:span text:style-name="T27">O(n)</text:span></text:p>
          </table:table-cell>
        </table:table-row>
        <table:table-row table:style-name="表格21.1">
          <table:table-cell table:style-name="表格21.A2" office:value-type="string">
            <text:p text:style-name="P16"><text:span text:style-name="T25">刪除</text:span></text:p>
          </table:table-cell>
          <table:table-cell table:style-name="表格21.A2" office:value-type="string">
            <text:p text:style-name="P17"><text:span text:style-name="T25">O(log n)</text:span></text:p>
          </table:table-cell>
          <table:table-cell table:style-name="表格21.A2" office:value-type="string">
            <text:p text:style-name="P17"><text:span text:style-name="T27">O(n)</text:span></text:p>
          </table:table-cell>
        </table:table-row>
      </table:table>
      <text:p text:style-name="P27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9"><text:span text:style-name="T29">⚠️ </text:span><text:span text:style-name="T33">為什麼最差是 O(n)？</text:span></text:p>
            <text:p text:style-name="P20"><text:span text:style-name="T32">若依序插入 1,2,3,4,5，BST 會退化成像鏈結串列的右斜樹，搜尋必須遍歷所有節點。</text:span></text:p>
            <text:p text:style-name="P21"><text:span text:style-name="T34">這正是 AVL 與 RBT 誕生的原因。</text:span></text:p>
          </table:table-cell>
        </table:table-row>
      </table:table>
      <text:p text:style-name="Standard"/>
      <text:h text:style-name="P12" text:outline-level="1"><text:span text:style-name="T18">第四章 <text:s/></text:span><text:span text:style-name="T19">AVL Tree 平衡二元搜尋樹</text:span></text:h>
      <text:p text:style-name="P13"><text:span text:style-name="T21">AVL Tree = BST ＋ 強制平衡。</text:span><text:span text:style-name="T20">每次插入或刪除後，都會檢查並維持</text:span><text:span text:style-name="T21">每個節點的「平衡因子」</text:span><text:span text:style-name="T20">，確保樹高始終維持在 </text:span><text:span text:style-name="T21">O(log n)</text:span><text:span text:style-name="T20">。</text:span></text:p>
      <text:h text:style-name="P14" text:outline-level="2"><text:span text:style-name="T22">▍</text:span><text:span text:style-name="T23">4.1　平衡因子（Balance Factor, BF）</text:span></text:h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19"><text:span text:style-name="T29">⭐ </text:span><text:span text:style-name="T40">BF 定義（必背）</text:span></text:p>
            <text:p text:style-name="P20"><text:span text:style-name="T41">BF = 左子樹高度 − 右子樹高度</text:span></text:p>
            <text:p text:style-name="P21"><text:span text:style-name="T32">合法範圍：BF ∈ { −1, 0, +1 }，即 </text:span><text:span text:style-name="T41">│BF│ ≤ 1</text:span><text:span text:style-name="T32">。</text:span></text:p>
          </table:table-cell>
        </table:table-row>
      </table:table>
      <text:p text:style-name="P22"/>
      <text:p text:style-name="P13"><text:span text:style-name="T21">+1：</text:span><text:span text:style-name="T20">左子樹較高　</text:span><text:span text:style-name="T21">0：</text:span><text:span text:style-name="T20">完全平衡　</text:span><text:span text:style-name="T21">−1：</text:span><text:span text:style-name="T20">右子樹較高。若 </text:span><text:span text:style-name="T21">│BF│ = 2</text:span><text:span text:style-name="T20"> 就發生失衡，必須旋轉修正。</text:span></text:p>
      <text:h text:style-name="P14" text:outline-level="2"><text:span text:style-name="T22">▍</text:span><text:span text:style-name="T23">4.2　四種旋轉（AVL 最核心考點）</text:span></text:h>
      <text:p text:style-name="P13"><text:span text:style-name="T20">插入或刪除後，若出現失衡節點，依失衡方向分為四種情況：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column table:style-name="表格24.D"/>
        <table:table-header-rows>
          <table:table-row table:style-name="表格24.1">
            <table:table-cell table:style-name="表格24.A1" office:value-type="string">
              <text:p text:style-name="P15"><text:span text:style-name="T24">失衡類型</text:span></text:p>
            </table:table-cell>
            <table:table-cell table:style-name="表格24.A1" office:value-type="string">
              <text:p text:style-name="P15"><text:span text:style-name="T24">失衡方向</text:span></text:p>
            </table:table-cell>
            <table:table-cell table:style-name="表格24.A1" office:value-type="string">
              <text:p text:style-name="P15"><text:span text:style-name="T24">處理方式</text:span></text:p>
            </table:table-cell>
            <table:table-cell table:style-name="表格24.A1" office:value-type="string">
              <text:p text:style-name="P15"><text:span text:style-name="T24">口訣</text:span>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16"><text:span text:style-name="T25">LL（左左）</text:span></text:p>
          </table:table-cell>
          <table:table-cell table:style-name="表格24.A2" office:value-type="string">
            <text:p text:style-name="P16"><text:span text:style-name="T25">失衡節點的</text:span><text:span text:style-name="T28">左</text:span><text:span text:style-name="T25">子樹，又</text:span><text:span text:style-name="T28">往左</text:span><text:span text:style-name="T25">插入</text:span></text:p>
          </table:table-cell>
          <table:table-cell table:style-name="表格24.A2" office:value-type="string">
            <text:p text:style-name="P16"><text:span text:style-name="T25">對失衡節點做「</text:span><text:span text:style-name="T28">右旋</text:span><text:span text:style-name="T25">」</text:span></text:p>
          </table:table-cell>
          <table:table-cell table:style-name="表格24.A2" office:value-type="string">
            <text:p text:style-name="P16"><text:span text:style-name="T35">LL → </text:span><text:span text:style-name="T44">右</text:span><text:span text:style-name="T35">旋</text:span></text:p>
          </table:table-cell>
        </table:table-row>
        <table:table-row table:style-name="表格24.1">
          <table:table-cell table:style-name="表格24.A3" office:value-type="string">
            <text:p text:style-name="P16"><text:span text:style-name="T25">RR（右右）</text:span></text:p>
          </table:table-cell>
          <table:table-cell table:style-name="表格24.A3" office:value-type="string">
            <text:p text:style-name="P16"><text:span text:style-name="T25">失衡節點的</text:span><text:span text:style-name="T28">右</text:span><text:span text:style-name="T25">子樹，又</text:span><text:span text:style-name="T28">往右</text:span><text:span text:style-name="T25">插入</text:span></text:p>
          </table:table-cell>
          <table:table-cell table:style-name="表格24.A3" office:value-type="string">
            <text:p text:style-name="P16"><text:span text:style-name="T25">對失衡節點做「</text:span><text:span text:style-name="T28">左旋</text:span><text:span text:style-name="T25">」</text:span></text:p>
          </table:table-cell>
          <table:table-cell table:style-name="表格24.A3" office:value-type="string">
            <text:p text:style-name="P16"><text:span text:style-name="T35">RR → </text:span><text:span text:style-name="T44">左</text:span><text:span text:style-name="T35">旋</text:span></text:p>
          </table:table-cell>
        </table:table-row>
        <table:table-row table:style-name="表格24.1">
          <table:table-cell table:style-name="表格24.A2" office:value-type="string">
            <text:p text:style-name="P16"><text:span text:style-name="T25">LR（左右）</text:span></text:p>
          </table:table-cell>
          <table:table-cell table:style-name="表格24.A2" office:value-type="string">
            <text:p text:style-name="P16"><text:span text:style-name="T25">失衡節點的左子樹，轉而</text:span><text:span text:style-name="T28">往右</text:span><text:span text:style-name="T25">插入</text:span></text:p>
          </table:table-cell>
          <table:table-cell table:style-name="表格24.A2" office:value-type="string">
            <text:p text:style-name="P16"><text:span text:style-name="T28">先左旋，再右旋</text:span></text:p>
          </table:table-cell>
          <table:table-cell table:style-name="表格24.A2" office:value-type="string">
            <text:p text:style-name="P16"><text:span text:style-name="T35">LR → </text:span><text:span text:style-name="T44">先左後右</text:span></text:p>
          </table:table-cell>
        </table:table-row>
        <table:table-row table:style-name="表格24.1">
          <table:table-cell table:style-name="表格24.A3" office:value-type="string">
            <text:p text:style-name="P16"><text:span text:style-name="T25">RL（右左）</text:span></text:p>
          </table:table-cell>
          <table:table-cell table:style-name="表格24.A3" office:value-type="string">
            <text:p text:style-name="P16"><text:span text:style-name="T25">失衡節點的右子樹，轉而</text:span><text:span text:style-name="T28">往左</text:span><text:span text:style-name="T25">插入</text:span></text:p>
          </table:table-cell>
          <table:table-cell table:style-name="表格24.A3" office:value-type="string">
            <text:p text:style-name="P16"><text:span text:style-name="T28">先右旋，再左旋</text:span></text:p>
          </table:table-cell>
          <table:table-cell table:style-name="表格24.A3" office:value-type="string">
            <text:p text:style-name="P16"><text:span text:style-name="T35">RL → </text:span><text:span text:style-name="T44">先右後左</text:span></text:p>
          </table:table-cell>
        </table:table-row>
      </table:table>
      <text:p text:style-name="P23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19"><text:span text:style-name="T29">🔑 </text:span><text:span text:style-name="T30">口訣：AVL 旋轉（背這三句，四種全解）</text:span></text:p>
            <text:p text:style-name="P20"><text:span text:style-name="T31">① 同向一刀、反向兩刀。</text:span><text:span text:style-name="T32"> LL/RR 是同方向 → 旋一次；LR/RL 是反方向 → 旋兩次。</text:span></text:p>
            <text:p text:style-name="P20"><text:span text:style-name="T31">② 轉的方向跟「重的那邊」相反。</text:span><text:span text:style-name="T32"> 左邊重 → 右旋；右邊重 → 左旋。</text:span></text:p>
            <text:p text:style-name="P21"><text:span text:style-name="T31">③ 兩刀的情形「先轉小再轉大」。</text:span><text:span text:style-name="T32"> 先轉下面的子節點，再轉上面的失衡節點。</text:span></text:p>
          </table:table-cell>
        </table:table-row>
      </table:table>
      <text:p text:style-name="P22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9"><text:span text:style-name="T29">💡 </text:span><text:span text:style-name="T36">判斷旋轉類型的 4 步驟</text:span></text:p>
            <text:p text:style-name="P20"><text:span text:style-name="T37">Step 1．</text:span><text:span text:style-name="T32"> 找到失衡節點（│BF│ = 2 的節點）。</text:span></text:p>
            <text:p text:style-name="P20"><text:span text:style-name="T37">Step 2．</text:span><text:span text:style-name="T32"> 看失衡節點哪邊較高 → L 或 R。</text:span></text:p>
            <text:p text:style-name="P20"><text:span text:style-name="T37">Step 3．</text:span><text:span text:style-name="T32"> 看新增節點落在較高子樹的哪邊 → L 或 R。</text:span></text:p>
            <text:p text:style-name="P21"><text:span text:style-name="T37">Step 4．</text:span><text:span text:style-name="T32"> 組合成 LL / RR / LR / RL，套口訣即可。</text:span></text:p>
          </table:table-cell>
        </table:table-row>
      </table:table>
      <text:h text:style-name="P29" text:outline-level="3"><text:span text:style-name="T43">LL 旋轉詳解（右旋）</text:span></text:h>
      <text:p text:style-name="P13"><text:span text:style-name="T20">插入 15 後，60 的 BF = +2（左邊太高，且是左-左失衡）：</text:span></text:p>
      <table:table table:name="表格27" table:style-name="表格27">
        <table:table-column table:style-name="表格27.A"/>
        <text:soft-page-break/>
        <table:table-row table:style-name="表格27.1">
          <table:table-cell table:style-name="表格27.A1" office:value-type="string">
            <text:p text:style-name="P25"><text:span text:style-name="T39">旋轉前（失衡） <text:s text:c="25"/>右旋後（平衡）</text:span></text:p>
            <text:p text:style-name="P25"><text:span text:style-name="T39"><text:s text:c="6"/>60 <text:s/>(BF=+2) ← 失衡點 <text:s text:c="17"/>25 <text:s/>(BF=0)</text:span></text:p>
            <text:p text:style-name="P25"><text:span text:style-name="T39"><text:s text:c="5"/>/ <text:s text:c="36"/>/ <text:s/>\</text:span></text:p>
            <text:p text:style-name="P25"><text:span text:style-name="T39"><text:s text:c="3"/>25 <text:s/>(BF=+1) <text:s text:c="27"/>15 <text:s text:c="2"/>60</text:span></text:p>
            <text:p text:style-name="P25"><text:span text:style-name="T39"><text:s text:c="3"/>/</text:span></text:p>
            <text:p text:style-name="P25"><text:span text:style-name="T39"><text:s/>15 <text:s/>← 新插入</text:span></text:p>
          </table:table-cell>
        </table:table-row>
      </table:table>
      <text:h text:style-name="P29" text:outline-level="3"><text:span text:style-name="T43">RR 旋轉詳解（左旋）</text:span></text:h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25"><text:span text:style-name="T39">旋轉前（失衡） <text:s text:c="25"/>左旋後（平衡）</text:span></text:p>
            <text:p text:style-name="P25"><text:span text:style-name="T39"><text:s/>15 <text:s/>(BF=−2) ← 失衡點 <text:s text:c="22"/>25 <text:s/>(BF=0)</text:span></text:p>
            <text:p text:style-name="P25"><text:span text:style-name="T39"><text:s text:c="3"/>\ <text:s text:c="38"/>/ <text:s/>\</text:span></text:p>
            <text:p text:style-name="P25"><text:span text:style-name="T39"><text:s text:c="4"/>25 <text:s/>(BF=−1) <text:s text:c="25"/>15 <text:s text:c="2"/>60</text:span></text:p>
            <text:p text:style-name="P25"><text:span text:style-name="T39"><text:s text:c="6"/>\</text:span></text:p>
            <text:p text:style-name="P25"><text:span text:style-name="T39"><text:s text:c="7"/>60 <text:s/>← 新插入</text:span></text:p>
          </table:table-cell>
        </table:table-row>
      </table:table>
      <text:h text:style-name="P29" text:outline-level="3"><text:span text:style-name="T43">LR 旋轉詳解（先左旋，再右旋）</text:span></text:h>
      <text:p text:style-name="P13"><text:span text:style-name="T20">失衡節點在左邊，但新增節點落在左子節點的</text:span><text:span text:style-name="T21">右</text:span><text:span text:style-name="T20">邊：</text:span></text:p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25"><text:span text:style-name="T39">原始（失衡） <text:s text:c="9"/>Step1：左旋 25 <text:s text:c="9"/>Step2：右旋 60</text:span></text:p>
            <text:p text:style-name="P25"><text:span text:style-name="T39"><text:s text:c="3"/>60 (BF=+2)↑ <text:s text:c="10"/>60 <text:s text:c="22"/>30 (BF=0)</text:span></text:p>
            <text:p text:style-name="P25"><text:span text:style-name="T39"><text:s text:c="3"/>/ <text:s text:c="19"/>/ <text:s text:c="23"/>/ <text:s/>\</text:span></text:p>
            <text:p text:style-name="P25"><text:span text:style-name="T39"><text:s/>25 (BF=−1) <text:s text:c="10"/>30 <text:s text:c="22"/>25 <text:s text:c="3"/>60</text:span></text:p>
            <text:p text:style-name="P25"><text:span text:style-name="T39"><text:s text:c="3"/>\ <text:s text:c="17"/>/</text:span></text:p>
            <text:p text:style-name="P25"><text:span text:style-name="T39"><text:s text:c="4"/>30 <text:s/>← 新插入 <text:s text:c="4"/>25</text:span></text:p>
          </table:table-cell>
        </table:table-row>
      </table:table>
      <text:p text:style-name="P26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19"><text:span text:style-name="T29">⭐ </text:span><text:span text:style-name="T40">RL 旋轉（與 LR 完全相反）</text:span></text:p>
            <text:p text:style-name="P20"><text:span text:style-name="T32">失衡在右邊、新增節點落在右子節點的</text:span><text:span text:style-name="T41">左</text:span><text:span text:style-name="T32">邊。</text:span></text:p>
            <text:p text:style-name="P21"><text:span text:style-name="T32">處理：</text:span><text:span text:style-name="T41">先右旋，再左旋</text:span><text:span text:style-name="T32">（口訣：RL → 先右後左）。</text:span></text:p>
          </table:table-cell>
        </table:table-row>
      </table:table>
      <text:h text:style-name="P14" text:outline-level="2"><text:span text:style-name="T22">▍</text:span><text:span text:style-name="T23">4.3　AVL 時間複雜度</text:span></text:h>
      <text:p text:style-name="P13"><text:span text:style-name="T20">由於 AVL 永遠保持嚴格平衡，高度始終 O(log n)，因此：</text:span></text:p>
      <table:table table:name="表格31" table:style-name="表格31">
        <table:table-column table:style-name="表格31.A"/>
        <table:table-column table:style-name="表格31.B"/>
        <table:table-column table:style-name="表格31.C"/>
        <table:table-header-rows>
          <table:table-row table:style-name="表格31.1">
            <table:table-cell table:style-name="表格31.A1" office:value-type="string">
              <text:p text:style-name="P15"><text:span text:style-name="T24">操作</text:span></text:p>
            </table:table-cell>
            <table:table-cell table:style-name="表格31.A1" office:value-type="string">
              <text:p text:style-name="P15"><text:span text:style-name="T24">時間複雜度</text:span></text:p>
            </table:table-cell>
            <table:table-cell table:style-name="表格31.A1" office:value-type="string">
              <text:p text:style-name="P15"><text:span text:style-name="T24">說明</text:span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16"><text:span text:style-name="T25">搜尋（Search）</text:span></text:p>
          </table:table-cell>
          <table:table-cell table:style-name="表格31.A2" office:value-type="string">
            <text:p text:style-name="P16"><text:span text:style-name="T25">O(log n)</text:span></text:p>
          </table:table-cell>
          <table:table-cell table:style-name="表格31.A2" office:value-type="string">
            <text:p text:style-name="P16"><text:span text:style-name="T25">永遠保證，不退化</text:span></text:p>
          </table:table-cell>
        </table:table-row>
        <table:table-row table:style-name="表格31.1">
          <table:table-cell table:style-name="表格31.A3" office:value-type="string">
            <text:p text:style-name="P16"><text:span text:style-name="T25">插入（Insert）</text:span></text:p>
          </table:table-cell>
          <table:table-cell table:style-name="表格31.A3" office:value-type="string">
            <text:p text:style-name="P16"><text:span text:style-name="T25">O(log n)</text:span></text:p>
          </table:table-cell>
          <table:table-cell table:style-name="表格31.A3" office:value-type="string">
            <text:p text:style-name="P16"><text:span text:style-name="T25">插入後最多做 O(log n) 次旋轉</text:span></text:p>
          </table:table-cell>
        </table:table-row>
        <table:table-row table:style-name="表格31.1">
          <table:table-cell table:style-name="表格31.A2" office:value-type="string">
            <text:p text:style-name="P16"><text:span text:style-name="T25">刪除（Delete）</text:span></text:p>
          </table:table-cell>
          <table:table-cell table:style-name="表格31.A2" office:value-type="string">
            <text:p text:style-name="P16"><text:span text:style-name="T25">O(log n)</text:span></text:p>
          </table:table-cell>
          <table:table-cell table:style-name="表格31.A2" office:value-type="string">
            <text:p text:style-name="P16"><text:span text:style-name="T25">刪除後最多做 O(log n) 次旋轉</text:span></text:p>
          </table:table-cell>
        </table:table-row>
      </table:table>
      <text:p text:style-name="Standard"/>
      <text:h text:style-name="P12" text:outline-level="1"><text:span text:style-name="T18">第五章 <text:s/></text:span><text:span text:style-name="T19">AVL 實作範例（113 高考 Q3）</text:span></text:h>
      <text:p text:style-name="P13"><text:span text:style-name="T20">初始 AVL Tree：</text:span><text:span text:style-name="T21">25( 15 , 60( 30 , 80 ) )</text:span></text:p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25"><text:span text:style-name="T39"><text:s text:c="4"/>25 <text:s/>(BF=−1)</text:span></text:p>
            <text:p text:style-name="P25"><text:span text:style-name="T39"><text:s text:c="3"/>/ <text:s/>\</text:span></text:p>
            <text:p text:style-name="P25"><text:span text:style-name="T39"><text:s text:c="2"/>15 <text:s text:c="2"/>60 <text:s/>(BF=0)</text:span></text:p>
            <text:p text:style-name="P25"><text:span text:style-name="T39"><text:s text:c="6"/>/ <text:s/>\</text:span></text:p>
            <text:p text:style-name="P25"><text:span text:style-name="T39"><text:s text:c="5"/>30 <text:s text:c="2"/>80</text:span></text:p>
          </table:table-cell>
        </table:table-row>
      </table:table>
      <text:h text:style-name="P14" text:outline-level="2"><text:span text:style-name="T22">▍</text:span><text:span text:style-name="T23">步驟一：插入 90</text:span></text:h>
      <text:list text:continue-numbering="true" text:style-name="WWNum2">
        <text:list-item>
          <text:p text:style-name="P28"><text:span text:style-name="T20">90 &gt; 25 → 往右；90 &gt; 60 → 往右；90 &gt; 80 → 放到 80 的右子。</text:span></text:p>
        </text:list-item>
        <text:list-item>
          <text:p text:style-name="P28"><text:span text:style-name="T20">往上檢查：到節點 25 時，BF = 1 − 3 = −2，超過限制 → </text:span><text:span text:style-name="T21">失衡！</text:span></text:p>
        </text:list-item>
        <text:list-item>
          <text:p text:style-name="P28"><text:span text:style-name="T20">失衡節點 25 → 右邊太高 → 新節點 90 在右子樹的右邊 → </text:span><text:span text:style-name="T21">RR 失衡</text:span><text:span text:style-name="T20">。</text:span></text:p>
        </text:list-item>
        <text:list-item>
          <text:p text:style-name="P28"><text:span text:style-name="T20">處理：對 25 做「</text:span><text:span text:style-name="T21">左旋</text:span><text:span text:style-name="T20">」，60 成為新根。</text:span></text:p>
        </text:list-item>
      </text:list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25"><text:span text:style-name="T39">插入後（失衡） <text:s text:c="22"/>RR 左旋後（平衡）</text:span></text:p>
            <text:p text:style-name="P25"><text:span text:style-name="T39"><text:s text:c="4"/>25 (BF=−2)↑ 失衡點 <text:s text:c="20"/>60 <text:s/>(BF=0)</text:span></text:p>
            <text:p text:style-name="P25"><text:span text:style-name="T39"><text:s text:c="3"/>/ <text:s/>\ <text:s text:c="33"/>/ <text:s text:c="3"/>\</text:span></text:p>
            <text:p text:style-name="P25"><text:span text:style-name="T39"><text:s text:c="2"/>15 <text:s text:c="2"/>60 <text:s text:c="29"/>25 <text:s text:c="5"/>80</text:span></text:p>
            <text:p text:style-name="P25"><text:span text:style-name="T39"><text:s text:c="6"/>/ <text:s/>\ <text:s text:c="27"/>/ <text:s/>\ <text:s text:c="5"/>\</text:span></text:p>
            <text:p text:style-name="P25"><text:span text:style-name="T39"><text:s text:c="5"/>30 <text:s text:c="2"/>80 <text:s text:c="24"/>15 <text:s/>30 <text:s text:c="5"/>90</text:span></text:p>
            <text:p text:style-name="P25"><text:span text:style-name="T39"><text:s text:c="12"/>\</text:span></text:p>
            <text:p text:style-name="P25"><text:span text:style-name="T39"><text:s text:c="13"/>90 ← 新插入</text:span></text:p>
          </table:table-cell>
        </table:table-row>
      </table:table>
      <text:p text:style-name="P13"><text:span text:style-name="T20">旋轉後：60( 25( 15 , 30 ) , 80( − , 90 ) )</text:span></text:p>
      <text:h text:style-name="P14" text:outline-level="2"><text:span text:style-name="T22">▍</text:span><text:span text:style-name="T23">步驟二：插入 85</text:span></text:h>
      <text:list text:continue-numbering="true" text:style-name="WWNum2">
        <text:list-item>
          <text:p text:style-name="P28"><text:span text:style-name="T20">85 &gt; 60 → 右；85 &gt; 80 → 右；85 &lt; 90 → 放到 90 的左子。</text:span></text:p>
        </text:list-item>
        <text:list-item>
          <text:p text:style-name="P28"><text:span text:style-name="T20">往上檢查：到節點 80 時，BF = 0 − 2 = −2 → </text:span><text:span text:style-name="T21">失衡！</text:span></text:p>
        </text:list-item>
        <text:list-item>
          <text:p text:style-name="P28"><text:span text:style-name="T20">失衡節點 80 → 右邊太高 → 新節點 85 在右子 90 的左邊 → </text:span><text:span text:style-name="T21">RL 失衡</text:span><text:span text:style-name="T20">。</text:span></text:p>
        </text:list-item>
        <text:list-item>
          <text:p text:style-name="P28"><text:span text:style-name="T20">處理：先對 90 做「右旋」，再對 80 做「左旋」，85 提升為新根。</text:span></text:p>
        </text:list-item>
      </text:list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25"><text:span text:style-name="T39">插入後（失衡） <text:s text:c="7"/>Step1：右旋 90 <text:s text:c="7"/>Step2：左旋 80</text:span></text:p>
            <text:p text:style-name="P25"><text:span text:style-name="T39"><text:s/>80 (BF=−2)↑ <text:s text:c="9"/>80 <text:s text:c="22"/>85 (BF=0)</text:span></text:p>
            <text:p text:style-name="P25"><text:span text:style-name="T39"><text:s text:c="3"/>\ <text:s text:c="18"/>\ <text:s text:c="22"/>/ <text:s/>\</text:span></text:p>
            <text:p text:style-name="P25"><text:span text:style-name="T39"><text:s text:c="4"/>90 <text:s text:c="17"/>85 <text:s text:c="19"/>80 <text:s text:c="2"/>90</text:span></text:p>
            <text:p text:style-name="P25"><text:span text:style-name="T39"><text:s text:c="4"/>/ <text:s text:c="20"/>\</text:span></text:p>
            <text:p text:style-name="P25"><text:span text:style-name="T39"><text:s text:c="3"/>85 ← 新插入 <text:s text:c="13"/>90</text:span></text:p>
          </table:table-cell>
        </table:table-row>
      </table:table>
      <text:p text:style-name="P13"><text:span text:style-name="T20">旋轉後完整樹：60( 25( 15 , 30 ) , 85( 80 , 90 ) )</text:span></text:p>
      <text:h text:style-name="P14" text:outline-level="2"><text:span text:style-name="T22">▍</text:span><text:span text:style-name="T23">步驟三：刪除 15</text:span></text:h>
      <text:list text:continue-numbering="true" text:style-name="WWNum2">
        <text:list-item>
          <text:p text:style-name="P28"><text:span text:style-name="T20">15 為葉節點（無子節點）→ 直接刪除。</text:span></text:p>
        </text:list-item>
        <text:list-item>
          <text:p text:style-name="P28"><text:span text:style-name="T20">往上重新計算所有節點的 BF。</text:span></text:p>
        </text:list-item>
      </text:list>
      <table:table table:name="表格35" table:style-name="表格35">
        <table:table-column table:style-name="表格35.A"/>
        <text:soft-page-break/>
        <table:table-row table:style-name="表格35.1">
          <table:table-cell table:style-name="表格35.A1" office:value-type="string">
            <text:p text:style-name="P25"><text:span text:style-name="T39">最終樹與各節點 BF：</text:span></text:p>
            <text:p text:style-name="P25"><text:span text:style-name="T39"><text:s text:c="8"/>60 (BF=0)</text:span></text:p>
            <text:p text:style-name="P25"><text:span text:style-name="T39"><text:s text:c="7"/>/ <text:s text:c="4"/>\</text:span></text:p>
            <text:p text:style-name="P25"><text:span text:style-name="T39"><text:s text:c="4"/>25(BF=−1) 85(BF=0)</text:span></text:p>
            <text:p text:style-name="P25"><text:span text:style-name="T39"><text:s text:c="7"/>\ <text:s text:c="5"/>/ <text:s text:c="2"/>\</text:span></text:p>
            <text:p text:style-name="P25"><text:span text:style-name="T39"><text:s text:c="7"/>30(0) 80(0) 90(0)</text:span></text:p>
          </table:table-cell>
        </table:table-row>
      </table:table>
      <text:p text:style-name="P26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9"><text:span text:style-name="T29">⚠️ </text:span><text:span text:style-name="T33">關於 BF 計算的考場提醒</text:span></text:p>
            <text:p text:style-name="P20"><text:span text:style-name="T32">考場筆記若出現「60(−1)」之類標記，代表該節點 BF=−1。</text:span></text:p>
            <text:p text:style-name="P21"><text:span text:style-name="T32">本範例最終 60 的 BF 應為 0（左高=2、右高=2）。</text:span><text:span text:style-name="T34">考試務必自行計算，不要死背別人筆記裡的數字。</text:span></text:p>
          </table:table-cell>
        </table:table-row>
      </table:table>
      <text:p text:style-name="Standard"/>
      <text:h text:style-name="P12" text:outline-level="1"><text:span text:style-name="T18">第六章 <text:s/></text:span><text:span text:style-name="T19">Red-Black Tree 紅黑樹（五大規則）</text:span></text:h>
      <text:p text:style-name="P13"><text:span text:style-name="T20">紅黑樹是 </text:span><text:span text:style-name="T21">BST</text:span><text:span text:style-name="T20"> 的一種，每個節點除了儲存資料外，</text:span><text:span text:style-name="T21">額外儲存一個顏色（Red 或 Black）</text:span><text:span text:style-name="T20">，透過一套顏色規則確保樹高維持 </text:span><text:span text:style-name="T21">O(log n)</text:span><text:span text:style-name="T20">，避免 BST 退化。</text:span></text:p>
      <text:p text:style-name="P30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19"><text:span text:style-name="T29">💡 </text:span><text:span text:style-name="T36">本章學習路線（建議照這個順序讀）</text:span></text:p>
            <text:p text:style-name="P20"><text:span text:style-name="T37">先記五條規則（本章）→ 再用 (2,4)-Tree 理解規則為何長這樣（第七章）→ 自然就懂為什麼會平衡（第七章末）→ 最後跟 AVL 比較（第八章）。</text:span></text:p>
            <text:p text:style-name="P21"><text:span text:style-name="T32">規則先背起來，看完 (2,4)-Tree 你會「啊～原來如此」。</text:span></text:p>
          </table:table-cell>
        </table:table-row>
      </table:table>
      <text:h text:style-name="P14" text:outline-level="2"><text:span text:style-name="T22">▍</text:span><text:span text:style-name="T23">6.1　五大核心規則</text:span></text:h>
      <table:table table:name="表格38" table:style-name="表格38">
        <table:table-column table:style-name="表格38.A"/>
        <table:table-column table:style-name="表格38.B"/>
        <table:table-column table:style-name="表格38.C"/>
        <table:table-header-rows>
          <table:table-row table:style-name="表格38.1">
            <table:table-cell table:style-name="表格38.A1" office:value-type="string">
              <text:p text:style-name="P15"><text:span text:style-name="T24">規則</text:span></text:p>
            </table:table-cell>
            <table:table-cell table:style-name="表格38.A1" office:value-type="string">
              <text:p text:style-name="P15"><text:span text:style-name="T24">說明</text:span></text:p>
            </table:table-cell>
            <table:table-cell table:style-name="表格38.A1" office:value-type="string">
              <text:p text:style-name="P15"><text:span text:style-name="T24">範例 / 重點</text:span></text:p>
            </table:table-cell>
          </table:table-row>
        </table:table-header-rows>
        <table:table-row table:style-name="表格38.1">
          <table:table-cell table:style-name="表格38.A2" office:value-type="string">
            <text:p text:style-name="P16"><text:span text:style-name="T42">規則一</text:span></text:p>
          </table:table-cell>
          <table:table-cell table:style-name="表格38.A2" office:value-type="string">
            <text:p text:style-name="P16"><text:span text:style-name="T25">每個節點非紅即黑</text:span></text:p>
          </table:table-cell>
          <table:table-cell table:style-name="表格38.A2" office:value-type="string">
            <text:p text:style-name="P16"><text:span text:style-name="T25">每個節點都有一個顏色屬性</text:span></text:p>
          </table:table-cell>
        </table:table-row>
        <table:table-row table:style-name="表格38.1">
          <table:table-cell table:style-name="表格38.A3" office:value-type="string">
            <text:p text:style-name="P16"><text:span text:style-name="T42">規則二</text:span></text:p>
          </table:table-cell>
          <table:table-cell table:style-name="表格38.A3" office:value-type="string">
            <text:p text:style-name="P16"><text:span text:style-name="T28">根節點（Root）必須是黑色</text:span></text:p>
          </table:table-cell>
          <table:table-cell table:style-name="表格38.A3" office:value-type="string">
            <text:p text:style-name="P16"><text:span text:style-name="T25">樹的根永遠是 Black</text:span></text:p>
          </table:table-cell>
        </table:table-row>
        <table:table-row table:style-name="表格38.1">
          <table:table-cell table:style-name="表格38.A2" office:value-type="string">
            <text:p text:style-name="P16"><text:span text:style-name="T42">規則三</text:span></text:p>
          </table:table-cell>
          <table:table-cell table:style-name="表格38.A2" office:value-type="string">
            <text:p text:style-name="P16"><text:span text:style-name="T28">所有 NIL（空節點）都是黑色</text:span></text:p>
          </table:table-cell>
          <table:table-cell table:style-name="表格38.A2" office:value-type="string">
            <text:p text:style-name="P16"><text:span text:style-name="T25">葉節點的空子節點視為黑色</text:span></text:p>
          </table:table-cell>
        </table:table-row>
        <table:table-row table:style-name="表格38.1">
          <table:table-cell table:style-name="表格38.A3" office:value-type="string">
            <text:p text:style-name="P16"><text:span text:style-name="T27">規則四</text:span></text:p>
          </table:table-cell>
          <table:table-cell table:style-name="表格38.A3" office:value-type="string">
            <text:p text:style-name="P16"><text:span text:style-name="T28">紅色節點的子節點必須是黑色（紅不接紅）</text:span></text:p>
          </table:table-cell>
          <table:table-cell table:style-name="表格38.A3" office:value-type="string">
            <text:p text:style-name="P16"><text:span text:style-name="T25">違反例：B→R→R 連續兩個紅</text:span></text:p>
          </table:table-cell>
        </table:table-row>
        <table:table-row table:style-name="表格38.1">
          <table:table-cell table:style-name="表格38.A2" office:value-type="string">
            <text:p text:style-name="P16"><text:span text:style-name="T27">規則五</text:span></text:p>
          </table:table-cell>
          <table:table-cell table:style-name="表格38.A2" office:value-type="string">
            <text:p text:style-name="P16"><text:span text:style-name="T28">從任一節點到後代 NIL 的所有路徑，黑色節點數相同（黑高度相同）</text:span></text:p>
          </table:table-cell>
          <table:table-cell table:style-name="表格38.A2" office:value-type="string">
            <text:p text:style-name="P16"><text:span text:style-name="T25">這條保證了平衡</text:span></text:p>
          </table:table-cell>
        </table:table-row>
      </table:table>
      <text:p text:style-name="P23"/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9"><text:span text:style-name="T29">🔑 </text:span><text:span text:style-name="T30">口訣：紅黑樹五規則（四黑一紅好記）</text:span></text:p>
            <text:p text:style-name="P20"><text:span text:style-name="T31">頭黑（根黑）、腳黑（NIL 黑）、紅不接紅、黑路一樣長。</text:span></text:p>
            <text:p text:style-name="P20"><text:span text:style-name="T32">再加上最基本的「每個節點非紅即黑」，五條到齊。</text:span></text:p>
            <text:p text:style-name="P21"><text:span text:style-name="T32">更短：</text:span><text:span text:style-name="T31">「根黑、葉黑、紅不連、黑高齊」</text:span><text:span text:style-name="T32">。</text:span></text:p>
          </table:table-cell>
        </table:table-row>
      </table:table>
      <text:p text:style-name="Standard"/>
      <text:h text:style-name="P12" text:outline-level="1"><text:span text:style-name="T18">第七章 <text:s/></text:span><text:span text:style-name="T19">用 (2,4)-Tree 徹底理解紅黑樹</text:span></text:h>
      <text:p text:style-name="P13"><text:span text:style-name="T21">核心觀念：Red-Black Tree 本質上就是 (2,4)-Tree（又稱 2-3-4 Tree）的二元樹表示法。</text:span><text:span text:style-name="T20">理解這個對應關係，那五條看似奇怪的規則就會全部變得理所當然。</text:span></text:p>
      <text:h text:style-name="P14" text:outline-level="2"><text:span text:style-name="T22">▍</text:span><text:span text:style-name="T23">7.1　什麼是 (2,4)-Tree？</text:span></text:h>
      <text:p text:style-name="P13"><text:span text:style-name="T21">(2,4)-Tree 是 B-Tree 的一種</text:span><text:span text:style-name="T20">（B-Tree 就一句話帶過即可）。它</text:span><text:span text:style-name="T21">每個節點可儲存 1～3 個鍵值，並有 2～4 個子節點</text:span><text:span text:style-name="T20">（命名看「子節點數量」，不是鍵值數量）：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header-rows>
          <table:table-row table:style-name="表格40.1">
            <table:table-cell table:style-name="表格40.A1" office:value-type="string">
              <text:p text:style-name="P15"><text:span text:style-name="T24">節點類型</text:span></text:p>
            </table:table-cell>
            <table:table-cell table:style-name="表格40.A1" office:value-type="string">
              <text:p text:style-name="P15"><text:span text:style-name="T24">鍵值數量</text:span></text:p>
            </table:table-cell>
            <table:table-cell table:style-name="表格40.A1" office:value-type="string">
              <text:p text:style-name="P15"><text:span text:style-name="T24">子節點數量</text:span></text:p>
            </table:table-cell>
            <table:table-cell table:style-name="表格40.A1" office:value-type="string">
              <text:p text:style-name="P15"><text:span text:style-name="T24">範例</text:span>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16"><text:span text:style-name="T28">2-node</text:span></text:p>
          </table:table-cell>
          <table:table-cell table:style-name="表格40.A2" office:value-type="string">
            <text:p text:style-name="P17"><text:span text:style-name="T25">1 個鍵值</text:span></text:p>
          </table:table-cell>
          <table:table-cell table:style-name="表格40.A2" office:value-type="string">
            <text:p text:style-name="P17"><text:span text:style-name="T25">2 個子節點（或為葉）</text:span></text:p>
          </table:table-cell>
          <table:table-cell table:style-name="表格40.A2" office:value-type="string">
            <text:p text:style-name="P17"><text:span text:style-name="T25">[50]</text:span></text:p>
          </table:table-cell>
        </table:table-row>
        <table:table-row table:style-name="表格40.1">
          <table:table-cell table:style-name="表格40.A3" office:value-type="string">
            <text:p text:style-name="P16"><text:span text:style-name="T28">3-node</text:span></text:p>
          </table:table-cell>
          <table:table-cell table:style-name="表格40.A3" office:value-type="string">
            <text:p text:style-name="P17"><text:span text:style-name="T25">2 個鍵值</text:span></text:p>
          </table:table-cell>
          <table:table-cell table:style-name="表格40.A3" office:value-type="string">
            <text:p text:style-name="P17"><text:span text:style-name="T25">3 個子節點（或為葉）</text:span></text:p>
          </table:table-cell>
          <table:table-cell table:style-name="表格40.A3" office:value-type="string">
            <text:p text:style-name="P17"><text:span text:style-name="T25">[30 │ 50]</text:span></text:p>
          </table:table-cell>
        </table:table-row>
        <table:table-row table:style-name="表格40.1">
          <table:table-cell table:style-name="表格40.A2" office:value-type="string">
            <text:p text:style-name="P16"><text:span text:style-name="T28">4-node</text:span></text:p>
          </table:table-cell>
          <table:table-cell table:style-name="表格40.A2" office:value-type="string">
            <text:p text:style-name="P17"><text:span text:style-name="T25">3 個鍵值</text:span></text:p>
          </table:table-cell>
          <table:table-cell table:style-name="表格40.A2" office:value-type="string">
            <text:p text:style-name="P17"><text:span text:style-name="T25">4 個子節點（或為葉）</text:span></text:p>
          </table:table-cell>
          <table:table-cell table:style-name="表格40.A2" office:value-type="string">
            <text:p text:style-name="P17"><text:span text:style-name="T25">[20 │ 30 │ 50]</text:span></text:p>
          </table:table-cell>
        </table:table-row>
      </table:table>
      <text:p text:style-name="P27"/>
      <text:p text:style-name="P13"><text:span text:style-name="T21">為什麼子節點比鍵值多一個？</text:span><text:span text:style-name="T20"> 因為 </text:span><text:span text:style-name="T21">n 個鍵值會把數線切成 n+1 段</text:span><text:span text:style-name="T20">，每段對應一條往下走的路：</text:span>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25"><text:span text:style-name="T39"><text:s text:c="12"/>[30 | 50] <text:s text:c="4"/>← 2 個鍵值（3-node）</text:span></text:p>
            <text:p text:style-name="P25"><text:span text:style-name="T39"><text:s text:c="11"/>/ <text:s text:c="3"/>| <text:s text:c="3"/>\</text:span></text:p>
            <text:p text:style-name="P25"><text:span text:style-name="T39"><text:s text:c="8"/>&lt;30 <text:s/>30~50 <text:s/>&gt;50 <text:s text:c="3"/>← 3 條路（3 個子節點）</text:span></text:p>
          </table:table-cell>
        </table:table-row>
      </table:table>
      <text:p text:style-name="P22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9"><text:span text:style-name="T29">⭐ </text:span><text:span text:style-name="T40">(2,4)-Tree 最重要特性</text:span></text:p>
            <text:p text:style-name="P21"><text:span text:style-name="T41">所有葉節點都在同一層（完全平衡）。</text:span><text:span text:style-name="T32"> 這正是 RBT「黑高度相同」規則的來源。</text:span></text:p>
          </table:table-cell>
        </table:table-row>
      </table:table>
      <text:h text:style-name="P14" text:outline-level="2"><text:span text:style-name="T22">▍</text:span><text:span text:style-name="T23">7.2　三種節點怎麼轉成 RBT？</text:span></text:h>
      <text:p text:style-name="P13"><text:span text:style-name="T21">轉換核心思想：把 (2,4)-Tree 的每個節點「展開」成二元樹；展開方式決定顏色。</text:span><text:span text:style-name="T20"> 下面分別說明三種節點（這不是流程，所以用 ①②③ 條列）。</text:span></text:p>
      <text:h text:style-name="P29" text:outline-level="3"><text:span text:style-name="T43">① 2-node 怎麼轉？（最簡單）</text:span></text:h>
      <text:p text:style-name="P13"><text:span text:style-name="T20">2-node 只有一個鍵值 [X]，本來就是二元樹形狀，</text:span><text:span text:style-name="T21">不需展開，直接塗黑</text:span><text:span text:style-name="T20">。</text:span>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25"><text:span text:style-name="T39"><text:s text:c="2"/>(2,4) 的 2-node <text:s text:c="15"/>RBT 對應（黑色節點）</text:span></text:p>
            <text:p text:style-name="P25"><text:span text:style-name="T39"><text:s text:c="7"/>[50] <text:s text:c="27"/>50 (黑)</text:span></text:p>
            <text:p text:style-name="P25"><text:span text:style-name="T39"><text:s text:c="6"/>/ <text:s text:c="3"/>\ <text:s text:c="25"/>/ <text:s text:c="3"/>\</text:span></text:p>
            <text:p text:style-name="P25"><text:span text:style-name="T39"><text:s text:c="4"/>子1 <text:s text:c="3"/>子2 <text:s text:c="22"/>子1 <text:s text:c="3"/>子2</text:span></text:p>
            <text:p text:style-name="P25"><text:span text:style-name="T39"><text:s text:c="2"/>1 個鍵值，2 條路 <text:s text:c="18"/>直接塗黑，結構不變</text:span></text:p>
          </table:table-cell>
        </table:table-row>
      </table:table>
      <text:h text:style-name="P29" text:outline-level="3"><text:span text:style-name="T43">② 3-node 怎麼轉？（有兩種展開方向）</text:span></text:h>
      <text:p text:style-name="P13"><text:span text:style-name="T20">3-node 有兩個鍵值 [X │ Y]，要拆成「上下兩層」：一個當黑節點（上層），另一個當紅節點（下層，依附在黑節點旁）。兩種合法展開（X &lt; Y）：</text:span></text:p>
      <table:table table:name="表格44" table:style-name="表格44">
        <table:table-column table:style-name="表格44.A"/>
        <text:soft-page-break/>
        <table:table-row table:style-name="表格44.1">
          <table:table-cell table:style-name="表格44.A1" office:value-type="string">
            <text:p text:style-name="P25"><text:span text:style-name="T39"><text:s text:c="2"/>(2,4) 3-node <text:s text:c="9"/>方式①：Y黑 X紅（左傾） <text:s text:c="5"/>方式②：X黑 Y紅（右傾）</text:span></text:p>
            <text:p text:style-name="P25"><text:span text:style-name="T39"><text:s text:c="4"/>[X │ Y] <text:s text:c="18"/>Y (黑) <text:s text:c="20"/>X (黑)</text:span></text:p>
            <text:p text:style-name="P25"><text:span text:style-name="T39"><text:s text:c="3"/>/ <text:s/>│ <text:s/>\ <text:s text:c="17"/>/ <text:s text:c="3"/>\ <text:s text:c="20"/>/ <text:s text:c="3"/>\</text:span></text:p>
            <text:p text:style-name="P25"><text:span text:style-name="T39"><text:s text:c="2"/>A <text:s text:c="2"/>B <text:s text:c="2"/>C <text:s text:c="14"/>X(紅) <text:s text:c="2"/>C <text:s text:c="18"/>A <text:s text:c="3"/>Y(紅)</text:span></text:p>
            <text:p text:style-name="P25"><text:span text:style-name="T39"><text:s/>A&lt;X&lt;B&lt;Y&lt;C <text:s text:c="14"/>/ <text:s/>\ <text:s text:c="29"/>/ <text:s/>\</text:span></text:p>
            <text:p text:style-name="P25"><text:span text:style-name="T39"><text:s text:c="24"/>A <text:s text:c="3"/>B <text:s text:c="27"/>B <text:s text:c="3"/>C</text:span></text:p>
          </table:table-cell>
        </table:table-row>
      </table:table>
      <text:p text:style-name="P22"/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9"><text:span text:style-name="T29">💡 </text:span><text:span text:style-name="T36">為什麼紅節點一定在黑節點「旁邊（下面）」？</text:span></text:p>
            <text:p text:style-name="P20"><text:span text:style-name="T32">因為二元樹每個節點只能放一個值。3-node 有兩個鍵值，轉換時一定要有一個「往下降一層」。</text:span></text:p>
            <text:p text:style-name="P20"><text:span text:style-name="T37">往下降的那個就塗紅色</text:span><text:span text:style-name="T32">，表示「它其實和上面的黑節點是同一個 (2,4)-node 的成員」。</text:span></text:p>
            <text:p text:style-name="P21"><text:span text:style-name="T37">紅色 = 『我跟我的黑色父節點，是同一個 (2,4)-node』</text:span><text:span text:style-name="T32">。</text:span></text:p>
          </table:table-cell>
        </table:table-row>
      </table:table>
      <text:h text:style-name="P29" text:outline-level="3"><text:span text:style-name="T43">③ 4-node 怎麼轉？（固定展開）</text:span></text:h>
      <text:p text:style-name="P13"><text:span text:style-name="T20">4-node 有三個鍵值 [X │ Y │ Z]，</text:span><text:span text:style-name="T21">中間 Y 塗黑、左右 X 與 Z 各塗紅</text:span><text:span text:style-name="T20">，分別掛在 Y 的左右。這種展開固定，沒有其他選擇。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25"><text:span text:style-name="T39"><text:s text:c="2"/>(2,4) 4-node <text:s text:c="17"/>RBT 對應（黑居中，左右各一紅）</text:span></text:p>
            <text:p text:style-name="P25"><text:span text:style-name="T39"><text:s text:c="3"/>[X │ Y │ Z] <text:s text:c="25"/>Y (黑)</text:span></text:p>
            <text:p text:style-name="P25"><text:span text:style-name="T39"><text:s text:c="2"/>/ <text:s/>│ <text:s text:c="2"/>│ <text:s/>\ <text:s text:c="25"/>/ <text:s text:c="4"/>\</text:span></text:p>
            <text:p text:style-name="P25"><text:span text:style-name="T39"><text:s/>A <text:s text:c="2"/>B <text:s text:c="2"/>C <text:s text:c="2"/>D <text:s text:c="21"/>X(紅) <text:s text:c="3"/>Z(紅)</text:span></text:p>
            <text:p text:style-name="P25"><text:span text:style-name="T39"><text:s/>A&lt;X&lt;B&lt;Y&lt;C&lt;Z&lt;D <text:s text:c="20"/>/ <text:s/>\ <text:s text:c="5"/>/ <text:s/>\</text:span></text:p>
            <text:p text:style-name="P25"><text:span text:style-name="T39"><text:s text:c="34"/>A <text:s text:c="3"/>B <text:s text:c="3"/>C <text:s text:c="3"/>D</text:span></text:p>
          </table:table-cell>
        </table:table-row>
      </table:table>
      <text:h text:style-name="P14" text:outline-level="2"><text:span text:style-name="T22">▍</text:span><text:span text:style-name="T23">7.3　4-node 發生 Split（分裂）時，RBT 怎麼對應？</text:span></text:h>
      <text:p text:style-name="P13"><text:span text:style-name="T20">當 (2,4)-Tree 插入新值使某個 4-node 溢位（變成「5 個鍵值」），必須 </text:span><text:span text:style-name="T21">Split（分裂）</text:span><text:span text:style-name="T20">：把中間鍵值往上推給父節點，左右各分成兩個子節點。在 RBT 中，這對應「</text:span><text:span text:style-name="T21">顏色翻轉（Color Flip）</text:span><text:span text:style-name="T20">」，有時再加旋轉。</text:span></text:p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25"><text:span text:style-name="T39"><text:s text:c="2"/>(2,4)：4-node Split <text:s text:c="18"/>RBT：顏色翻轉（Color Flip）</text:span></text:p>
            <text:p text:style-name="P25"><text:span text:style-name="T39"><text:s text:c="2"/>父 [P] <text:s text:c="36"/>Y (紅) ← Y 由黑變紅，往上「推」</text:span></text:p>
            <text:p text:style-name="P25"><text:span text:style-name="T39"><text:s text:c="5"/>│ <text:s text:c="37"/>/ <text:s text:c="2"/>\</text:span></text:p>
            <text:p text:style-name="P25"><text:span text:style-name="T39"><text:s text:c="2"/>[X│Y│Z] ← 溢位 <text:s text:c="23"/>X(黑) <text:s/>Z(黑) ← 兩子由紅變黑</text:span></text:p>
            <text:p text:style-name="P25"><text:span text:style-name="T39"><text:s text:c="5"/>↓ Split：Y 往上推</text:span></text:p>
            <text:p text:style-name="P25"><text:span text:style-name="T39"><text:s text:c="2"/>父 [P │ Y]</text:span></text:p>
            <text:p text:style-name="P25"><text:span text:style-name="T39"><text:s text:c="5"/>/ <text:s text:c="4"/>\</text:span></text:p>
            <text:p text:style-name="P25"><text:span text:style-name="T39"><text:s text:c="3"/>[X] <text:s text:c="4"/>[Z]</text:span></text:p>
          </table:table-cell>
        </table:table-row>
      </table:table>
      <text:p text:style-name="P26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19"><text:span text:style-name="T29">💡 </text:span><text:span text:style-name="T36">Color Flip 完整規則（原本『後補』，這裡補齊）</text:span></text:p>
            <text:p text:style-name="P20"><text:span text:style-name="T37">動作：</text:span><text:span text:style-name="T32"> 一個黑節點若左右兩個子節點都是紅 → 把</text:span><text:span text:style-name="T37">兩子變黑、自己變紅</text:span><text:span text:style-name="T32">（等於把中間鍵值往上推）。</text:span></text:p>
            <text:p text:style-name="P20"><text:span text:style-name="T37">為什麼？</text:span><text:span text:style-name="T32"> 兩個紅子 = 這個位置擠了 3 個鍵值（4-node）。再多就違法，所以把中間那個（自己）往上送，左右分裂出去。</text:span></text:p>
            <text:p text:style-name="P20"><text:span text:style-name="T37">推上去後若父節點也是紅</text:span><text:span text:style-name="T32"> → 出現「紅接紅」違規 → 此時就需要</text:span><text:span text:style-name="T37">旋轉</text:span><text:span text:style-name="T32">修正（對應 (2,4) 父節點也滿了要繼續往上 Split）。</text:span></text:p>
            <text:p text:style-name="P21"><text:span text:style-name="T37">口訣：兩紅子 → 子變黑、我變紅；我若撞到紅父 → 再旋轉。</text:span></text:p>
          </table:table-cell>
        </table:table-row>
      </table:table>
      <text:p text:style-name="Standard"><text:soft-page-break/></text:p>
      <text:h text:style-name="P31" text:outline-level="2"><text:span text:style-name="T22">▍</text:span><text:span text:style-name="T23">7.4　完整轉換範例：一個一個 node 展開，再接回去</text:span></text:h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19"><text:span text:style-name="T29">✅ </text:span><text:span text:style-name="T30">先講方法，再動手（這是整章最重要的心法）</text:span></text:p>
            <text:p text:style-name="P20"><text:span text:style-name="T31">不要想整棵樹！一次只看一個 (2,4)-node：</text:span></text:p>
            <text:p text:style-name="P20"><text:span text:style-name="T31">第 1 步：</text:span><text:span text:style-name="T32"> 看這個 node 是 2-node、3-node 還是 4-node。</text:span></text:p>
            <text:p text:style-name="P20"><text:span text:style-name="T31">第 2 步：</text:span><text:span text:style-name="T32"> 套用對應展開規則（2→黑；3→黑+紅；4→黑+左右紅）。</text:span></text:p>
            <text:p text:style-name="P20"><text:span text:style-name="T31">第 3 步：</text:span><text:span text:style-name="T32"> 全部展開後，再照「原本的父子關係」把它們接回去。</text:span></text:p>
            <text:p text:style-name="P21"><text:span text:style-name="T32">原來不是「整棵樹一起轉」，而是「每個節點各自轉，再接回去」。</text:span></text:p>
          </table:table-cell>
        </table:table-row>
      </table:table>
      <text:h text:style-name="P29" text:outline-level="3"><text:span text:style-name="T43">範例一（含 2／3／4-node，最完整）</text:span>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25"><text:span text:style-name="T39">原始 (2,4)-Tree：</text:span></text:p>
            <text:p text:style-name="P25"><text:span text:style-name="T39"><text:s text:c="13"/>[40] <text:s text:c="13"/>← 2-node</text:span></text:p>
            <text:p text:style-name="P25"><text:span text:style-name="T39"><text:s text:c="11"/>/ <text:s text:c="5"/>\</text:span></text:p>
            <text:p text:style-name="P25"><text:span text:style-name="T39"><text:s text:c="6"/>[20│30] <text:s text:c="3"/>[60│70│80] <text:s text:c="3"/>← 左:3-node，右:4-node</text:span></text:p>
          </table:table-cell>
        </table:table-row>
      </table:table>
      <text:p text:style-name="P32"/>
      <text:p text:style-name="P13"><text:span text:style-name="T21">一次只看一個節點：</text:span></text:p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25"><text:span text:style-name="T39">第1步 看根 [40] → 2-node → 直接塗黑：</text:span></text:p>
            <text:p text:style-name="P25"><text:span text:style-name="T39"><text:s text:c="6"/>40(黑)</text:span></text:p>
            <text:p text:style-name="P25"><text:span text:style-name="T39"><text:s/></text:span></text:p>
            <text:p text:style-name="P25"><text:span text:style-name="T39">第2步 看左子 [20│30] → 3-node → 30黑、20紅（左傾）：</text:span></text:p>
            <text:p text:style-name="P25"><text:span text:style-name="T39"><text:s text:c="8"/>30(黑)</text:span></text:p>
            <text:p text:style-name="P25"><text:span text:style-name="T39"><text:s text:c="8"/>/</text:span></text:p>
            <text:p text:style-name="P25"><text:span text:style-name="T39"><text:s text:c="5"/>20(紅)</text:span></text:p>
            <text:p text:style-name="P25"><text:span text:style-name="T39"><text:s/></text:span></text:p>
            <text:p text:style-name="P25"><text:span text:style-name="T39">第3步 看右子 [60│70│80] → 4-node → 70黑、60紅、80紅：</text:span></text:p>
            <text:p text:style-name="P25"><text:span text:style-name="T39"><text:s text:c="8"/>70(黑)</text:span></text:p>
            <text:p text:style-name="P25"><text:span text:style-name="T39"><text:s text:c="8"/>/ <text:s text:c="3"/>\</text:span></text:p>
            <text:p text:style-name="P25"><text:span text:style-name="T39"><text:s text:c="5"/>60(紅) <text:s/>80(紅)</text:span></text:p>
            <text:p text:style-name="P25"><text:span text:style-name="T39"><text:s/></text:span></text:p>
            <text:p text:style-name="P25"><text:span text:style-name="T39">第4步 照原本父子關係接回去（40的左接30，右接70）：</text:span></text:p>
            <text:p text:style-name="P25"><text:span text:style-name="T39"><text:s text:c="13"/>40(黑)</text:span></text:p>
            <text:p text:style-name="P25"><text:span text:style-name="T39"><text:s text:c="11"/>/ <text:s text:c="7"/>\</text:span></text:p>
            <text:p text:style-name="P25"><text:span text:style-name="T39"><text:s text:c="7"/>30(黑) <text:s text:c="6"/>70(黑)</text:span></text:p>
            <text:p text:style-name="P25"><text:span text:style-name="T39"><text:s text:c="7"/>/ <text:s text:c="11"/>/ <text:s text:c="3"/>\</text:span></text:p>
            <text:p text:style-name="P25"><text:span text:style-name="T39"><text:s text:c="4"/>20(紅) <text:s text:c="6"/>60(紅) <text:s/>80(紅)</text:span></text:p>
          </table:table-cell>
        </table:table-row>
      </table:table>
      <text:p text:style-name="P22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19"><text:span text:style-name="T29">✅ </text:span><text:span text:style-name="T30">驗證最終 RBT（全部合法）</text:span></text:p>
            <text:p text:style-name="P21"><text:span text:style-name="T31">根黑</text:span><text:span text:style-name="T32"> ✓　</text:span><text:span text:style-name="T31">紅不接紅</text:span><text:span text:style-name="T32"> ✓（每個紅的父都是黑）　</text:span><text:span text:style-name="T31">各路徑黑高度相同</text:span><text:span text:style-name="T32"> ✓</text:span></text:p>
          </table:table-cell>
        </table:table-row>
      </table:table>
      <text:h text:style-name="P29" text:outline-level="3"><text:span text:style-name="T43">範例二（根是 3-node 的情形）</text:span>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25"><text:span text:style-name="T39">原始 (2,4)-Tree：</text:span></text:p>
            <text:p text:style-name="P25"><text:span text:style-name="T39"><text:s text:c="11"/>[30 │ 70] <text:s text:c="10"/>← 3-node（兩個鍵值）</text:span></text:p>
            <text:p text:style-name="P25"><text:span text:style-name="T39"><text:s text:c="10"/>/ <text:s text:c="3"/>│ <text:s text:c="3"/>\</text:span></text:p>
            <text:p text:style-name="P25"><text:span text:style-name="T39"><text:s text:c="7"/>[10] <text:s/>[50] <text:s/>[80│90] <text:s text:c="4"/>← 2-node, 2-node, 3-node</text:span></text:p>
          </table:table-cell>
        </table:table-row>
      </table:table>
      <text:p text:style-name="P32"/>
      <text:p text:style-name="P13"><text:soft-page-break/><text:span text:style-name="T21">一樣一個一個看：</text:span></text:p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25"><text:span text:style-name="T39">第1步 根 [30│70] → 3-node → 選「70黑、30紅（左傾）」：</text:span></text:p>
            <text:p text:style-name="P25"><text:span text:style-name="T39"><text:s text:c="8"/>70(黑)</text:span></text:p>
            <text:p text:style-name="P25"><text:span text:style-name="T39"><text:s text:c="8"/>/</text:span></text:p>
            <text:p text:style-name="P25"><text:span text:style-name="T39"><text:s text:c="5"/>30(紅)</text:span></text:p>
            <text:p text:style-name="P25"><text:span text:style-name="T39"><text:s/></text:span></text:p>
            <text:p text:style-name="P25"><text:span text:style-name="T39">第2步 子 [10] → 2-node → 10黑； <text:s/>子 [50] → 2-node → 50黑</text:span></text:p>
            <text:p text:style-name="P25"><text:span text:style-name="T39"><text:s/></text:span></text:p>
            <text:p text:style-name="P25"><text:span text:style-name="T39">第3步 子 [80│90] → 3-node → 90黑、80紅（左傾）：</text:span></text:p>
            <text:p text:style-name="P25"><text:span text:style-name="T39"><text:s text:c="8"/>90(黑)</text:span></text:p>
            <text:p text:style-name="P25"><text:span text:style-name="T39"><text:s text:c="8"/>/</text:span></text:p>
            <text:p text:style-name="P25"><text:span text:style-name="T39"><text:s text:c="5"/>80(紅)</text:span></text:p>
            <text:p text:style-name="P25"><text:span text:style-name="T39"><text:s/></text:span></text:p>
            <text:p text:style-name="P25"><text:span text:style-name="T39">第4步 照原本父子關係接回去：</text:span></text:p>
            <text:p text:style-name="P25"><text:span text:style-name="T39"><text:s text:c="14"/>70(黑)</text:span></text:p>
            <text:p text:style-name="P25"><text:span text:style-name="T39"><text:s text:c="13"/>/ <text:s text:c="5"/>\</text:span></text:p>
            <text:p text:style-name="P25"><text:span text:style-name="T39"><text:s text:c="10"/>30(紅) <text:s text:c="3"/>90(黑)</text:span></text:p>
            <text:p text:style-name="P25"><text:span text:style-name="T39"><text:s text:c="10"/>/ <text:s text:c="2"/>\ <text:s text:c="4"/>/</text:span></text:p>
            <text:p text:style-name="P25"><text:span text:style-name="T39"><text:s text:c="7"/>10(黑) 50(黑) 80(紅)</text:span></text:p>
          </table:table-cell>
        </table:table-row>
      </table:table>
      <text:p text:style-name="P22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9"><text:span text:style-name="T29">✅ </text:span><text:span text:style-name="T30">驗證</text:span></text:p>
            <text:p text:style-name="P21"><text:span text:style-name="T32">根黑 ✓　紅不接紅 ✓　各路徑黑高度相同（= 2）✓</text:span></text:p>
          </table:table-cell>
        </table:table-row>
      </table:table>
      <text:h text:style-name="P14" text:outline-level="2"><text:span text:style-name="T22">▍</text:span><text:span text:style-name="T23">7.5　轉換規則快速對照表</text:span></text:h>
      <table:table table:name="表格56" table:style-name="表格56">
        <table:table-column table:style-name="表格56.A"/>
        <table:table-column table:style-name="表格56.B"/>
        <table:table-column table:style-name="表格56.C"/>
        <table:table-column table:style-name="表格56.D"/>
        <table:table-header-rows>
          <table:table-row table:style-name="表格56.1">
            <table:table-cell table:style-name="表格56.A1" office:value-type="string">
              <text:p text:style-name="P15"><text:span text:style-name="T24">(2,4)-Tree 節點</text:span></text:p>
            </table:table-cell>
            <table:table-cell table:style-name="表格56.A1" office:value-type="string">
              <text:p text:style-name="P15"><text:span text:style-name="T24">轉換後 RBT 結構</text:span></text:p>
            </table:table-cell>
            <table:table-cell table:style-name="表格56.A1" office:value-type="string">
              <text:p text:style-name="P15"><text:span text:style-name="T24">顏色規則</text:span></text:p>
            </table:table-cell>
            <table:table-cell table:style-name="表格56.A1" office:value-type="string">
              <text:p text:style-name="P15"><text:span text:style-name="T24">備註</text:span></text:p>
            </table:table-cell>
          </table:table-row>
        </table:table-header-rows>
        <table:table-row table:style-name="表格56.1">
          <table:table-cell table:style-name="表格56.A2" office:value-type="string">
            <text:p text:style-name="P16"><text:span text:style-name="T25">2-node [X]</text:span></text:p>
          </table:table-cell>
          <table:table-cell table:style-name="表格56.A2" office:value-type="string">
            <text:p text:style-name="P16"><text:span text:style-name="T28">X（黑）</text:span></text:p>
          </table:table-cell>
          <table:table-cell table:style-name="表格56.A2" office:value-type="string">
            <text:p text:style-name="P16"><text:span text:style-name="T25">單一黑色</text:span></text:p>
          </table:table-cell>
          <table:table-cell table:style-name="表格56.A2" office:value-type="string">
            <text:p text:style-name="P16"><text:span text:style-name="T25">最簡單，直接對應</text:span></text:p>
          </table:table-cell>
        </table:table-row>
        <table:table-row table:style-name="表格56.1">
          <table:table-cell table:style-name="表格56.A3" office:value-type="string">
            <text:p text:style-name="P16"><text:span text:style-name="T25">3-node [X │ Y]</text:span></text:p>
          </table:table-cell>
          <table:table-cell table:style-name="表格56.A3" office:value-type="string">
            <text:p text:style-name="P16"><text:span text:style-name="T25">Y黑左子X紅　或　X黑右子Y紅</text:span></text:p>
          </table:table-cell>
          <table:table-cell table:style-name="表格56.A3" office:value-type="string">
            <text:p text:style-name="P16"><text:span text:style-name="T25">一黑一紅</text:span></text:p>
          </table:table-cell>
          <table:table-cell table:style-name="表格56.A3" office:value-type="string">
            <text:p text:style-name="P16"><text:span text:style-name="T25">兩種展開皆合法</text:span></text:p>
          </table:table-cell>
        </table:table-row>
        <table:table-row table:style-name="表格56.1">
          <table:table-cell table:style-name="表格56.A2" office:value-type="string">
            <text:p text:style-name="P16"><text:span text:style-name="T25">4-node [X │ Y │ Z]</text:span></text:p>
          </table:table-cell>
          <table:table-cell table:style-name="表格56.A2" office:value-type="string">
            <text:p text:style-name="P16"><text:span text:style-name="T28">Y黑，左X紅，右Z紅</text:span></text:p>
          </table:table-cell>
          <table:table-cell table:style-name="表格56.A2" office:value-type="string">
            <text:p text:style-name="P16"><text:span text:style-name="T25">黑居中、左右各一紅</text:span></text:p>
          </table:table-cell>
          <table:table-cell table:style-name="表格56.A2" office:value-type="string">
            <text:p text:style-name="P16"><text:span text:style-name="T25">固定展開，中間鍵值為黑</text:span></text:p>
          </table:table-cell>
        </table:table-row>
        <table:table-row table:style-name="表格56.1">
          <table:table-cell table:style-name="表格56.A3" office:value-type="string">
            <text:p text:style-name="P16"><text:span text:style-name="T25">4-node Split</text:span></text:p>
          </table:table-cell>
          <table:table-cell table:style-name="表格56.A3" office:value-type="string">
            <text:p text:style-name="P16"><text:span text:style-name="T25">兩子由紅→黑，父由黑→紅</text:span></text:p>
          </table:table-cell>
          <table:table-cell table:style-name="表格56.A3" office:value-type="string">
            <text:p text:style-name="P16"><text:span text:style-name="T25">Color Flip</text:span></text:p>
          </table:table-cell>
          <table:table-cell table:style-name="表格56.A3" office:value-type="string">
            <text:p text:style-name="P16"><text:span text:style-name="T25">若父也是紅則需再旋轉</text:span></text:p>
          </table:table-cell>
        </table:table-row>
        <table:table-row table:style-name="表格56.1">
          <table:table-cell table:style-name="表格56.A2" office:value-type="string">
            <text:p text:style-name="P16"><text:span text:style-name="T25">所有葉節點同層</text:span></text:p>
          </table:table-cell>
          <table:table-cell table:style-name="表格56.A2" office:value-type="string">
            <text:p text:style-name="P16"><text:span text:style-name="T25">所有路徑黑高度相同</text:span></text:p>
          </table:table-cell>
          <table:table-cell table:style-name="表格56.A2" office:value-type="string">
            <text:p text:style-name="P16"><text:span text:style-name="T25">RBT 規則五的來源</text:span></text:p>
          </table:table-cell>
          <table:table-cell table:style-name="表格56.A2" office:value-type="string">
            <text:p text:style-name="P16"><text:span text:style-name="T25">RBT 不退化的根本原因</text:span></text:p>
          </table:table-cell>
        </table:table-row>
      </table:table>
      <text:p text:style-name="P23"/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19"><text:span text:style-name="T29">⭐ </text:span><text:span text:style-name="T40">考試速記：RBT 的規則為什麼這樣定？</text:span></text:p>
            <text:p text:style-name="P20"><text:span text:style-name="T41">「紅不接紅」</text:span><text:span text:style-name="T32"> → 連續兩紅代表三個鍵值疊在一起，超過 4-node 上限（最多 3 鍵值），在 (2,4)-Tree 不允許。</text:span></text:p>
            <text:p text:style-name="P20"><text:span text:style-name="T41">「黑高度相同」</text:span><text:span text:style-name="T32"> → 因為 (2,4)-Tree 所有葉節點同層；轉成 RBT 後只有黑節點代表真正的「(2,4) 層數」，所以每條路徑黑節點數必須相同。</text:span></text:p>
            <text:p text:style-name="P20"><text:span text:style-name="T41">「根節點是黑」</text:span><text:span text:style-name="T32"> → 根沒有父節點，不可能是某 (2,4)-node 的依附紅節點，所以必為黑。</text:span></text:p>
            <text:p text:style-name="P21"><text:span text:style-name="T41">一句話：RBT 每條規則都在『模擬 (2,4)-Tree 的行為』，不是憑空發明的限制。</text:span></text:p>
          </table:table-cell>
        </table:table-row>
      </table:table>
      <text:h text:style-name="P14" text:outline-level="2"><text:soft-page-break/><text:span text:style-name="T22">▍</text:span><text:span text:style-name="T23">7.6　為什麼 RBT 一定是 O(log n)？（高度證明）</text:span></text:h>
      <text:p text:style-name="P13"><text:span text:style-name="T20">理解了 (2,4)-Tree，這個證明就變得很直覺。設 RBT 有 n 個節點、樹高為 h：</text:span></text:p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9"><text:span text:style-name="T29">💡 </text:span><text:span text:style-name="T36">兩步推導（原本『後補』，這裡補齊）</text:span></text:p>
            <text:p text:style-name="P20"><text:span text:style-name="T37">① 紅節點最多和黑一樣多。</text:span><text:span text:style-name="T32"> 因為「紅不接紅」，任一條路徑上紅黑只能交替，最多是「黑紅黑紅…」。所以整條路徑長度 ≤ 黑節點數的 2 倍，即 </text:span><text:span text:style-name="T37">h ≤ 2 × (黑高度)</text:span><text:span text:style-name="T32">。</text:span></text:p>
            <text:p text:style-name="P20"><text:span text:style-name="T37">② </text:span><text:span text:style-name="T45">黑高度約等於 (2,4)-Tree 的高度</text:span><text:span text:style-name="T37">。</text:span><text:span text:style-name="T32"> 因為只有黑節點代表真正的層；一棵裝了 n 個節點的 (2,4)-Tree 高度 ≈ log₂(n+1)，所以</text:span><text:span text:style-name="T37">黑高度 ≤ log₂(n+1)</text:span><text:span text:style-name="T32">。</text:span></text:p>
            <text:p text:style-name="P20"><text:span text:style-name="T37">合併①②：</text:span><text:span text:style-name="T32"> h ≤ 2 × log₂(n+1)，即 </text:span><text:span text:style-name="T37">h = O(log n)</text:span><text:span text:style-name="T32">。</text:span></text:p>
            <text:p text:style-name="P21"><text:span text:style-name="T32">因此 Search / Insert / Delete 全部保證 O(log n)，永不退化。</text:span></text:p>
          </table:table-cell>
        </table:table-row>
      </table:table>
      <text:p text:style-name="P22"/>
      <text:p text:style-name="P13"><text:span text:style-name="T21">(2,4)-Tree 高度公式</text:span><text:span text:style-name="T20">（補充，理解即可）：若有 n 個鍵值，高度 h 滿足</text:span></text:p>
      <table:table table:name="表格59" table:style-name="表格59">
        <table:table-column table:style-name="表格59.A"/>
        <table:table-row table:style-name="表格59.1">
          <table:table-cell table:style-name="表格59.A1" office:value-type="string">
            <text:p text:style-name="P25"><text:span text:style-name="T39"><text:s text:c="2"/>⌊log₂(n+1)⌋ / 2 <text:s/>≤ <text:s/>h <text:s/>≤ <text:s/>log₂(n+1)</text:span></text:p>
            <text:p text:style-name="P25"><text:span text:style-name="T39"><text:s/></text:span></text:p>
            <text:p text:style-name="P25"><text:span text:style-name="T39"><text:s text:c="2"/>下界：每個節點最多塞 3 鍵值 → 同樣資料層數更少（約一半）</text:span></text:p>
            <text:p text:style-name="P25"><text:span text:style-name="T39"><text:s text:c="2"/>上界：每個節點至少 1 鍵值 → 退化成像二元樹的 log₂(n+1)</text:span></text:p>
            <text:p text:style-name="P25"><text:span text:style-name="T39"><text:s text:c="2"/>→ 對應的 RBT 高度 h_RBT ≤ 2h = O(log n)</text:span></text:p>
          </table:table-cell>
        </table:table-row>
      </table:table>
      <text:p text:style-name="Standard"/>
      <text:h text:style-name="P12" text:outline-level="1"><text:span text:style-name="T18">第八章 <text:s/></text:span><text:span text:style-name="T19">AVL vs Red-Black Tree 完整比較</text:span></text:h>
      <text:p text:style-name="P13"><text:span text:style-name="T20">理解了兩者的平衡機制後，這張比較表會非常清楚。</text:span><text:span text:style-name="T21">重點：AVL 更嚴格（查找略快），RBT 較寬鬆（插刪略快）。</text:span></text:p>
      <table:table table:name="表格60" table:style-name="表格60">
        <table:table-column table:style-name="表格60.A"/>
        <table:table-column table:style-name="表格60.B"/>
        <table:table-column table:style-name="表格60.C"/>
        <table:table-header-rows>
          <table:table-row table:style-name="表格60.1">
            <table:table-cell table:style-name="表格60.A1" office:value-type="string">
              <text:p text:style-name="P15"><text:span text:style-name="T24">比較項目</text:span></text:p>
            </table:table-cell>
            <table:table-cell table:style-name="表格60.A1" office:value-type="string">
              <text:p text:style-name="P15"><text:span text:style-name="T24">AVL Tree</text:span></text:p>
            </table:table-cell>
            <table:table-cell table:style-name="表格60.A1" office:value-type="string">
              <text:p text:style-name="P15"><text:span text:style-name="T24">Red-Black Tree</text:span></text:p>
            </table:table-cell>
          </table:table-row>
        </table:table-header-rows>
        <table:table-row table:style-name="表格60.1">
          <table:table-cell table:style-name="表格60.A2" office:value-type="string">
            <text:p text:style-name="P16"><text:span text:style-name="T25">平衡嚴格度</text:span></text:p>
          </table:table-cell>
          <table:table-cell table:style-name="表格60.A2" office:value-type="string">
            <text:p text:style-name="P16"><text:span text:style-name="T25">更嚴格（│BF│ ≤ 1）</text:span></text:p>
          </table:table-cell>
          <table:table-cell table:style-name="表格60.A2" office:value-type="string">
            <text:p text:style-name="P16"><text:span text:style-name="T25">較寬鬆（只須滿足 5 條規則）</text:span></text:p>
          </table:table-cell>
        </table:table-row>
        <table:table-row table:style-name="表格60.1">
          <table:table-cell table:style-name="表格60.A3" office:value-type="string">
            <text:p text:style-name="P16"><text:span text:style-name="T25">樹的高度</text:span></text:p>
          </table:table-cell>
          <table:table-cell table:style-name="表格60.A3" office:value-type="string">
            <text:p text:style-name="P16"><text:span text:style-name="T25">更矮（查找路徑更短）</text:span></text:p>
          </table:table-cell>
          <table:table-cell table:style-name="表格60.A3" office:value-type="string">
            <text:p text:style-name="P16"><text:span text:style-name="T25">稍高（最多 2log n）</text:span></text:p>
          </table:table-cell>
        </table:table-row>
        <table:table-row table:style-name="表格60.1">
          <table:table-cell table:style-name="表格60.A2" office:value-type="string">
            <text:p text:style-name="P16"><text:span text:style-name="T25">旋轉次數</text:span></text:p>
          </table:table-cell>
          <table:table-cell table:style-name="表格60.A2" office:value-type="string">
            <text:p text:style-name="P16"><text:span text:style-name="T25">插入/刪除可能需較多旋轉</text:span></text:p>
          </table:table-cell>
          <table:table-cell table:style-name="表格60.A2" office:value-type="string">
            <text:p text:style-name="P16"><text:span text:style-name="T25">插入最多 2 次、刪除最多 3 次</text:span></text:p>
          </table:table-cell>
        </table:table-row>
        <table:table-row table:style-name="表格60.1">
          <table:table-cell table:style-name="表格60.A3" office:value-type="string">
            <text:p text:style-name="P16"><text:span text:style-name="T25">查找效能</text:span></text:p>
          </table:table-cell>
          <table:table-cell table:style-name="表格60.A3" office:value-type="string">
            <text:p text:style-name="P16"><text:span text:style-name="T44">稍快</text:span><text:span text:style-name="T35">（樹較矮）</text:span></text:p>
          </table:table-cell>
          <table:table-cell table:style-name="表格60.A3" office:value-type="string">
            <text:p text:style-name="P16"><text:span text:style-name="T25">稍慢（樹可能稍高）</text:span></text:p>
          </table:table-cell>
        </table:table-row>
        <table:table-row table:style-name="表格60.1">
          <table:table-cell table:style-name="表格60.A2" office:value-type="string">
            <text:p text:style-name="P16"><text:span text:style-name="T25">插入/刪除效能</text:span></text:p>
          </table:table-cell>
          <table:table-cell table:style-name="表格60.A2" office:value-type="string">
            <text:p text:style-name="P16"><text:span text:style-name="T25">稍慢（旋轉較多）</text:span></text:p>
          </table:table-cell>
          <table:table-cell table:style-name="表格60.A2" office:value-type="string">
            <text:p text:style-name="P16"><text:span text:style-name="T44">稍快</text:span><text:span text:style-name="T35">（旋轉較少）</text:span></text:p>
          </table:table-cell>
        </table:table-row>
        <table:table-row table:style-name="表格60.1">
          <table:table-cell table:style-name="表格60.A3" office:value-type="string">
            <text:p text:style-name="P16"><text:span text:style-name="T25">適用場景</text:span></text:p>
          </table:table-cell>
          <table:table-cell table:style-name="表格60.A3" office:value-type="string">
            <text:p text:style-name="P16"><text:span text:style-name="T25">查找頻繁的應用</text:span></text:p>
          </table:table-cell>
          <table:table-cell table:style-name="表格60.A3" office:value-type="string">
            <text:p text:style-name="P16"><text:span text:style-name="T25">插刪頻繁（如 Linux 核心、Java TreeMap）</text:span></text:p>
          </table:table-cell>
        </table:table-row>
      </table:table>
      <text:p text:style-name="P23"/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9"><text:span text:style-name="T29">🔑 </text:span><text:span text:style-name="T30">口訣：AVL vs RBT 一句話</text:span></text:p>
            <text:p text:style-name="P21"><text:span text:style-name="T31">查找多 → 選 AVL（更矮更快）；插刪多 → 選 RBT（旋轉少）。</text:span></text:p>
          </table:table-cell>
        </table:table-row>
      </table:table>
      <text:p text:style-name="Standard"/>
      <text:h text:style-name="P12" text:outline-level="1"><text:span text:style-name="T18">第九章 <text:s/></text:span><text:span text:style-name="T19">RBT 實作範例（115 關務 Q4：依序插入 1~8）</text:span></text:h>
      <text:p text:style-name="P13"><text:span text:style-name="T20">本題展示 BST 與 RBT 插入相同資料後的巨大差異，是理解紅黑樹必要性的最佳範例。</text:span></text:p>
      <text:h text:style-name="P14" text:outline-level="2"><text:span text:style-name="T22">▍</text:span><text:span text:style-name="T23">BST 依序插入 1,2,3,4,5,6,7,8 的結果</text:span></text:h>
      <table:table table:name="表格62" table:style-name="表格62">
        <table:table-column table:style-name="表格62.A"/>
        <table:table-row table:style-name="表格62.1">
          <table:table-cell table:style-name="表格62.A1" office:value-type="string">
            <text:p text:style-name="P25"><text:span text:style-name="T39">BST 退化成右斜樹（鏈結串列）</text:span></text:p>
            <text:p text:style-name="P25"><text:span text:style-name="T39"><text:s text:c="2"/>1</text:span></text:p>
            <text:p text:style-name="P25"><text:span text:style-name="T39"><text:s text:c="3"/>\</text:span></text:p>
            <text:p text:style-name="P25"><text:span text:style-name="T39"><text:s text:c="4"/>2</text:span></text:p>
            <text:p text:style-name="P25"><text:span text:style-name="T39"><text:s text:c="5"/>\</text:span></text:p>
            <text:p text:style-name="P25"><text:span text:style-name="T39"><text:s text:c="6"/>3</text:span></text:p>
            <text:p text:style-name="P25"><text:span text:style-name="T39"><text:s text:c="7"/>\</text:span></text:p>
            <text:p text:style-name="P25"><text:span text:style-name="T39"><text:s text:c="8"/>4 → 5 → 6 → 7 → 8</text:span></text:p>
            <text:p text:style-name="P25"><text:span text:style-name="T39"><text:s/></text:span></text:p>
            <text:p text:style-name="P25"><text:span text:style-name="T39">高度 = 8 = O(n)，搜尋最差需走 8 步</text:span></text:p>
          </table:table-cell>
        </table:table-row>
      </table:table>
      <text:p text:style-name="P22"/>
      <text:h text:style-name="P14" text:outline-level="2"><text:span text:style-name="T22">▍</text:span><text:span text:style-name="T23">RBT 依序插入 1,2,3,4,5,6,7,8 的過程</text:span></text:h>
      <text:p text:style-name="P13"><text:span text:style-name="T20">RBT 在每次插入後，透過「變色」與「旋轉」維持平衡。關鍵步驟：</text:span>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header-rows>
          <table:table-row table:style-name="表格63.1">
            <table:table-cell table:style-name="表格63.A1" office:value-type="string">
              <text:p text:style-name="P15"><text:span text:style-name="T24">插入節點</text:span></text:p>
            </table:table-cell>
            <table:table-cell table:style-name="表格63.A1" office:value-type="string">
              <text:p text:style-name="P15"><text:span text:style-name="T24">觸發操作</text:span></text:p>
            </table:table-cell>
            <table:table-cell table:style-name="表格63.A1" office:value-type="string">
              <text:p text:style-name="P15"><text:span text:style-name="T24">說明</text:span></text:p>
            </table:table-cell>
          </table:table-row>
        </table:table-header-rows>
        <table:table-row table:style-name="表格63.1">
          <table:table-cell table:style-name="表格63.A2" office:value-type="string">
            <text:p text:style-name="P16"><text:span text:style-name="T25">插入 1</text:span></text:p>
          </table:table-cell>
          <table:table-cell table:style-name="表格63.A2" office:value-type="string">
            <text:p text:style-name="P16"><text:span text:style-name="T25">無</text:span></text:p>
          </table:table-cell>
          <table:table-cell table:style-name="表格63.A2" office:value-type="string">
            <text:p text:style-name="P16"><text:span text:style-name="T25">1 為根，塗黑</text:span></text:p>
          </table:table-cell>
        </table:table-row>
        <table:table-row table:style-name="表格63.1">
          <table:table-cell table:style-name="表格63.A3" office:value-type="string">
            <text:p text:style-name="P16"><text:span text:style-name="T25">插入 2</text:span></text:p>
          </table:table-cell>
          <table:table-cell table:style-name="表格63.A3" office:value-type="string">
            <text:p text:style-name="P16"><text:span text:style-name="T25">無</text:span></text:p>
          </table:table-cell>
          <table:table-cell table:style-name="表格63.A3" office:value-type="string">
            <text:p text:style-name="P16"><text:span text:style-name="T25">2 為 1 的右子，塗紅（合法）</text:span></text:p>
          </table:table-cell>
        </table:table-row>
        <table:table-row table:style-name="表格63.1">
          <table:table-cell table:style-name="表格63.A2" office:value-type="string">
            <text:p text:style-name="P16"><text:span text:style-name="T25">插入 3</text:span></text:p>
          </table:table-cell>
          <table:table-cell table:style-name="表格63.A2" office:value-type="string">
            <text:p text:style-name="P16"><text:span text:style-name="T25">RR 旋轉 + 變色</text:span></text:p>
          </table:table-cell>
          <table:table-cell table:style-name="表格63.A2" office:value-type="string">
            <text:p text:style-name="P16"><text:span text:style-name="T25">1-2-3 連成右斜 → 左旋，2 成新根(黑)，1、3 塗紅</text:span></text:p>
          </table:table-cell>
        </table:table-row>
        <table:table-row table:style-name="表格63.1">
          <table:table-cell table:style-name="表格63.A3" office:value-type="string">
            <text:p text:style-name="P16"><text:span text:style-name="T25">插入 4</text:span></text:p>
          </table:table-cell>
          <table:table-cell table:style-name="表格63.A3" office:value-type="string">
            <text:p text:style-name="P16"><text:span text:style-name="T25">變色</text:span></text:p>
          </table:table-cell>
          <table:table-cell table:style-name="表格63.A3" office:value-type="string">
            <text:p text:style-name="P16"><text:span text:style-name="T25">4 接在 3 右，檢查後變色即可</text:span></text:p>
          </table:table-cell>
        </table:table-row>
        <table:table-row table:style-name="表格63.1">
          <table:table-cell table:style-name="表格63.A2" office:value-type="string">
            <text:p text:style-name="P16"><text:span text:style-name="T25">插入 5</text:span></text:p>
          </table:table-cell>
          <table:table-cell table:style-name="表格63.A2" office:value-type="string">
            <text:p text:style-name="P16"><text:span text:style-name="T25">RR 旋轉 + 變色</text:span></text:p>
          </table:table-cell>
          <table:table-cell table:style-name="表格63.A2" office:value-type="string">
            <text:p text:style-name="P16"><text:span text:style-name="T25">觸發旋轉，持續調整平衡</text:span></text:p>
          </table:table-cell>
        </table:table-row>
        <table:table-row table:style-name="表格63.1">
          <table:table-cell table:style-name="表格63.A3" office:value-type="string">
            <text:p text:style-name="P16"><text:span text:style-name="T25">插入 6~8</text:span></text:p>
          </table:table-cell>
          <table:table-cell table:style-name="表格63.A3" office:value-type="string">
            <text:p text:style-name="P16"><text:span text:style-name="T25">多次旋轉 + 變色</text:span></text:p>
          </table:table-cell>
          <table:table-cell table:style-name="表格63.A3" office:value-type="string">
            <text:p text:style-name="P16"><text:span text:style-name="T25">依此類推，RBT 持續自我修正</text:span></text:p>
          </table:table-cell>
        </table:table-row>
      </table:table>
      <text:p text:style-name="P27"/>
      <table:table table:name="表格64" table:style-name="表格64">
        <table:table-column table:style-name="表格64.A"/>
        <table:table-row table:style-name="表格64.1">
          <table:table-cell table:style-name="表格64.A1" office:value-type="string">
            <text:p text:style-name="P25"><text:span text:style-name="T39">最終 RBT 結果（根 = 4）</text:span></text:p>
            <text:p text:style-name="P25"><text:span text:style-name="T39"><text:s text:c="14"/>4(黑)</text:span></text:p>
            <text:p text:style-name="P25"><text:span text:style-name="T39"><text:s text:c="12"/>/ <text:s text:c="6"/>\</text:span></text:p>
            <text:p text:style-name="P25"><text:span text:style-name="T39"><text:s text:c="9"/>2(紅) <text:s text:c="6"/>6(紅)</text:span></text:p>
            <text:p text:style-name="P25"><text:span text:style-name="T39"><text:s text:c="8"/>/ <text:s text:c="3"/>\ <text:s text:c="6"/>/ <text:s text:c="3"/>\</text:span></text:p>
            <text:p text:style-name="P25"><text:span text:style-name="T39"><text:s text:c="6"/>1(黑) <text:s/>3(黑) 5(黑) <text:s/>7(黑)</text:span></text:p>
            <text:p text:style-name="P25"><text:span text:style-name="T39"><text:s text:c="31"/>\</text:span></text:p>
            <text:p text:style-name="P25"><text:span text:style-name="T39"><text:s text:c="31"/>8(紅)</text:span></text:p>
            <text:p text:style-name="P25"><text:span text:style-name="T39"><text:s/></text:span></text:p>
            <text:p text:style-name="P25"><text:span text:style-name="T39">高度 ≈ 4 = O(log n)，搜尋最差只需 4~5 步</text:span></text:p>
          </table:table-cell>
        </table:table-row>
      </table:table>
      <text:p text:style-name="P26"/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9"><text:span text:style-name="T29">✅ </text:span><text:span text:style-name="T30">本題結論</text:span></text:p>
            <text:p text:style-name="P21"><text:span text:style-name="T32">同樣依序插入 1~8：</text:span><text:span text:style-name="T31">BST 退化成 O(n) 的長鏈，RBT 卻自動維持成 O(log n) 的矮樹。</text:span><text:span text:style-name="T32"> 這就是紅黑樹存在的</text:span><text:soft-page-break/><text:span text:style-name="T32">意義。</text:span></text:p>
          </table:table-cell>
        </table:table-row>
      </table:table>
      <text:p text:style-name="Standard"/>
      <text:h text:style-name="P12" text:outline-level="1"><text:span text:style-name="T18">第十章 <text:s/></text:span><text:span text:style-name="T19">Heap 堆積與 Priority Queue</text:span></text:h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19"><text:span text:style-name="T29">⚠️ </text:span><text:span text:style-name="T33">重要觀念辨別：Heap ≠ BST！</text:span></text:p>
            <text:p text:style-name="P21"><text:span text:style-name="T32">很多初學者會混淆。</text:span><text:span text:style-name="T34">BST 的目標是「快速搜尋任意值」；Heap 的目標是「快速取出最大或最小值」</text:span><text:span text:style-name="T32">，兩者規則完全不同。</text:span></text:p>
          </table:table-cell>
        </table:table-row>
      </table:table>
      <text:h text:style-name="P14" text:outline-level="2"><text:span text:style-name="T22">▍</text:span><text:span text:style-name="T23">10.1　Heap 的基本規則</text:span>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column table:style-name="表格67.D"/>
        <table:table-header-rows>
          <table:table-row table:style-name="表格67.1">
            <table:table-cell table:style-name="表格67.A1" office:value-type="string">
              <text:p text:style-name="P15"><text:span text:style-name="T24">類型</text:span></text:p>
            </table:table-cell>
            <table:table-cell table:style-name="表格67.A1" office:value-type="string">
              <text:p text:style-name="P15"><text:span text:style-name="T24">規則</text:span></text:p>
            </table:table-cell>
            <table:table-cell table:style-name="表格67.A1" office:value-type="string">
              <text:p text:style-name="P15"><text:span text:style-name="T24">根節點</text:span></text:p>
            </table:table-cell>
            <table:table-cell table:style-name="表格67.A1" office:value-type="string">
              <text:p text:style-name="P15"><text:span text:style-name="T24">應用場景</text:span>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16"><text:span text:style-name="T42">Max Heap</text:span></text:p>
          </table:table-cell>
          <table:table-cell table:style-name="表格67.A2" office:value-type="string">
            <text:p text:style-name="P16"><text:span text:style-name="T25">父節點 ≥ 所有子節點</text:span></text:p>
          </table:table-cell>
          <table:table-cell table:style-name="表格67.A2" office:value-type="string">
            <text:p text:style-name="P16"><text:span text:style-name="T25">最大值</text:span></text:p>
          </table:table-cell>
          <table:table-cell table:style-name="表格67.A2" office:value-type="string">
            <text:p text:style-name="P16"><text:span text:style-name="T25">取最大值、Heap Sort 降序</text:span></text:p>
          </table:table-cell>
        </table:table-row>
        <table:table-row table:style-name="表格67.1">
          <table:table-cell table:style-name="表格67.A3" office:value-type="string">
            <text:p text:style-name="P16"><text:span text:style-name="T42">Min Heap</text:span></text:p>
          </table:table-cell>
          <table:table-cell table:style-name="表格67.A3" office:value-type="string">
            <text:p text:style-name="P16"><text:span text:style-name="T25">父節點 ≤ 所有子節點</text:span></text:p>
          </table:table-cell>
          <table:table-cell table:style-name="表格67.A3" office:value-type="string">
            <text:p text:style-name="P16"><text:span text:style-name="T25">最小值</text:span></text:p>
          </table:table-cell>
          <table:table-cell table:style-name="表格67.A3" office:value-type="string">
            <text:p text:style-name="P16"><text:span text:style-name="T25">取最小值、Priority Queue</text:span></text:p>
          </table:table-cell>
        </table:table-row>
      </table:table>
      <text:p text:style-name="P26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9"><text:span text:style-name="T29">⭐ </text:span><text:span text:style-name="T40">Heap 的第二個必要條件</text:span></text:p>
            <text:p text:style-name="P21"><text:span text:style-name="T32">Heap 一定是「</text:span><text:span text:style-name="T41">完全二元樹（Complete Binary Tree）</text:span><text:span text:style-name="T32">」——最後一層的節點必須從左到右依序填滿，不能有空缺。</text:span></text:p>
          </table:table-cell>
        </table:table-row>
      </table:table>
      <text:h text:style-name="P14" text:outline-level="2"><text:span text:style-name="T22">▍</text:span><text:span text:style-name="T23">10.2　Heap 的陣列表示法（必背公式）</text:span></text:h>
      <text:p text:style-name="P13"><text:span text:style-name="T20">由於完全二元樹的特性，Heap 可直接用陣列儲存，不需指標。設節點從 index 1 開始：</text:span></text:p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19"><text:span text:style-name="T29">⭐ </text:span><text:span text:style-name="T40">陣列索引三公式（默背）</text:span></text:p>
            <text:p text:style-name="P24"><text:span text:style-name="T38"><text:s text:c="2"/>節點 i 的父節點：⌊i / 2⌋</text:span></text:p>
            <text:p text:style-name="P24"><text:span text:style-name="T38"><text:s text:c="2"/>節點 i 的左子節點：2i</text:span></text:p>
            <text:p text:style-name="P24"><text:span text:style-name="T38"><text:s text:c="2"/>節點 i 的右子節點：2i + 1</text:span></text:p>
          </table:table-cell>
        </table:table-row>
      </table:table>
      <text:p text:style-name="P22"/>
      <text:p text:style-name="P13"><text:span text:style-name="T21">範例：</text:span><text:span text:style-name="T20">A = [90, 80, 70, 40, 30, 20, 10]（index 從 1 開始）</text:span></text:p>
      <text:list text:continue-numbering="true" text:style-name="WWNum2">
        <text:list-item>
          <text:p text:style-name="P28"><text:span text:style-name="T20">A[5] = 30；其父節點 = A[⌊5/2⌋] = A[2] = 80。</text:span></text:p>
        </text:list-item>
        <text:list-item>
          <text:p text:style-name="P28"><text:span text:style-name="T20">A[3] = 70；其左子 = A[6] = 20；右子 = A[7] = 10。</text:span></text:p>
        </text:list-item>
      </text:list>
      <text:h text:style-name="P14" text:outline-level="2"><text:span text:style-name="T22">▍</text:span><text:span text:style-name="T23">10.3　插入（Up-Heap / Heapify Up）</text:span></text:h>
      <text:list text:continue-numbering="true" text:style-name="WWNum2">
        <text:list-item>
          <text:p text:style-name="P28"><text:span text:style-name="T20">將新元素放在陣列最後（維持完全二元樹）。</text:span></text:p>
        </text:list-item>
        <text:list-item>
          <text:p text:style-name="P28"><text:span text:style-name="T20">與父節點比較：若違反 Heap 規則，與父節點交換。</text:span></text:p>
        </text:list-item>
        <text:list-item>
          <text:p text:style-name="P28"><text:span text:style-name="T20">持續往上比較，直到符合規則或到達根節點。</text:span></text:p>
        </text:list-item>
      </text:list>
      <text:p text:style-name="P13"><text:span text:style-name="T21">時間複雜度：</text:span><text:span text:style-name="T20">O(log n)（最多走樹的高度步）。</text:span></text:p>
      <text:h text:style-name="P14" text:outline-level="2"><text:span text:style-name="T22">▍</text:span><text:span text:style-name="T23">10.4　刪除最大值（Down-Heap / Heapify Down）</text:span></text:h>
      <text:list text:continue-numbering="true" text:style-name="WWNum2">
        <text:list-item>
          <text:p text:style-name="P28"><text:span text:style-name="T20">取出根節點（最大值）。</text:span></text:p>
        </text:list-item>
        <text:list-item>
          <text:p text:style-name="P28"><text:soft-page-break/><text:span text:style-name="T20">將陣列最後一個元素移到根的位置。</text:span></text:p>
        </text:list-item>
        <text:list-item>
          <text:p text:style-name="P28"><text:span text:style-name="T20">與兩個子節點中</text:span><text:span text:style-name="T21">較大者</text:span><text:span text:style-name="T20">比較：若違反規則，與較大子節點交換。</text:span></text:p>
        </text:list-item>
        <text:list-item>
          <text:p text:style-name="P28"><text:span text:style-name="T20">持續往下比較，直到符合規則或到達葉節點。</text:span></text:p>
        </text:list-item>
      </text:list>
      <text:p text:style-name="P13"><text:span text:style-name="T21">時間複雜度：</text:span><text:span text:style-name="T20">O(log n)。</text:span></text:p>
      <text:h text:style-name="P14" text:outline-level="2"><text:span text:style-name="T22">▍</text:span><text:span text:style-name="T23">10.5　Heap Sort</text:span></text:h>
      <text:p text:style-name="P13"><text:span text:style-name="T21">核心概念：</text:span><text:span text:style-name="T20">利用 Max Heap，每次取出根（最大值）固定到陣列尾端，再對剩餘元素做 Down-Heap，直到全部排序完成。</text:span></text:p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15"><text:span text:style-name="T24">步驟</text:span></text:p>
            </table:table-cell>
            <table:table-cell table:style-name="表格70.A1" office:value-type="string">
              <text:p text:style-name="P15"><text:span text:style-name="T24">操作</text:span></text:p>
            </table:table-cell>
            <table:table-cell table:style-name="表格70.A1" office:value-type="string">
              <text:p text:style-name="P15"><text:span text:style-name="T24">時間</text:span>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16"><text:span text:style-name="T25">建立 Max Heap</text:span></text:p>
          </table:table-cell>
          <table:table-cell table:style-name="表格70.A2" office:value-type="string">
            <text:p text:style-name="P16"><text:span text:style-name="T25">將 n 個元素建成 Max Heap</text:span></text:p>
          </table:table-cell>
          <table:table-cell table:style-name="表格70.A2" office:value-type="string">
            <text:p text:style-name="P16"><text:span text:style-name="T25">O(n)</text:span></text:p>
          </table:table-cell>
        </table:table-row>
        <table:table-row table:style-name="表格70.1">
          <table:table-cell table:style-name="表格70.A3" office:value-type="string">
            <text:p text:style-name="P16"><text:span text:style-name="T25">重複 n 次取最大值</text:span></text:p>
          </table:table-cell>
          <table:table-cell table:style-name="表格70.A3" office:value-type="string">
            <text:p text:style-name="P16"><text:span text:style-name="T25">交換根與末端 → Down-Heap</text:span></text:p>
          </table:table-cell>
          <table:table-cell table:style-name="表格70.A3" office:value-type="string">
            <text:p text:style-name="P16"><text:span text:style-name="T25">每次 O(log n)</text:span></text:p>
          </table:table-cell>
        </table:table-row>
        <table:table-row table:style-name="表格70.1">
          <table:table-cell table:style-name="表格70.A2" office:value-type="string">
            <text:p text:style-name="P16"><text:span text:style-name="T25">總時間複雜度</text:span></text:p>
          </table:table-cell>
          <table:table-cell table:style-name="表格70.A2" office:value-type="string">
            <text:p text:style-name="P16"><text:span text:style-name="T25">O(n) + n × O(log n)</text:span></text:p>
          </table:table-cell>
          <table:table-cell table:style-name="表格70.A2" office:value-type="string">
            <text:p text:style-name="P16"><text:span text:style-name="T28">O(n log n)</text:span></text:p>
          </table:table-cell>
        </table:table-row>
      </table:table>
      <text:p text:style-name="P27"/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9"><text:span text:style-name="T29">💡 </text:span><text:span text:style-name="T36">為什麼是 O(n log n) 而不是 O(n²)？</text:span></text:p>
            <text:p text:style-name="P20"><text:span text:style-name="T32">Down-Heap 每次最多往下走「樹的高度」步，而完全二元樹高度是 O(log n)，</text:span><text:span text:style-name="T37">不是 O(n)</text:span><text:span text:style-name="T32">。</text:span></text:p>
            <text:p text:style-name="P21"><text:span text:style-name="T32">因此 n 次操作總時間 = n × O(log n) = </text:span><text:span text:style-name="T37">O(n log n)</text:span><text:span text:style-name="T32">，而非 n × n = O(n²)。</text:span></text:p>
          </table:table-cell>
        </table:table-row>
      </table:table>
      <text:h text:style-name="P14" text:outline-level="2"><text:span text:style-name="T22">▍</text:span><text:span text:style-name="T23">10.6　Priority Queue（優先佇列）</text:span></text:h>
      <text:p text:style-name="P13"><text:span text:style-name="T21">與普通 Queue 的差異：</text:span><text:span text:style-name="T20">普通 Queue 是「先進先出（FIFO）」；Priority Queue 是「</text:span><text:span text:style-name="T21">優先權高者先出</text:span><text:span text:style-name="T20">」，不管到達順序。</text:span></text:p>
      <table:table table:name="表格72" table:style-name="表格72">
        <table:table-column table:style-name="表格72.A"/>
        <table:table-column table:style-name="表格72.B"/>
        <table:table-column table:style-name="表格72.C" table:number-columns-repeated="2"/>
        <table:table-header-rows>
          <table:table-row table:style-name="表格72.1">
            <table:table-cell table:style-name="表格72.A1" office:value-type="string">
              <text:p text:style-name="P15"><text:span text:style-name="T24">資料結構</text:span></text:p>
            </table:table-cell>
            <table:table-cell table:style-name="表格72.A1" office:value-type="string">
              <text:p text:style-name="P15"><text:span text:style-name="T24">取出最大值</text:span></text:p>
            </table:table-cell>
            <table:table-cell table:style-name="表格72.A1" office:value-type="string">
              <text:p text:style-name="P15"><text:span text:style-name="T24">插入</text:span></text:p>
            </table:table-cell>
            <table:table-cell table:style-name="表格72.A1" office:value-type="string">
              <text:p text:style-name="P15"><text:span text:style-name="T24">刪除最大值</text:span>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16"><text:span text:style-name="T25">未排序 Array</text:span></text:p>
          </table:table-cell>
          <table:table-cell table:style-name="表格72.A2" office:value-type="string">
            <text:p text:style-name="P17"><text:span text:style-name="T25">O(n)</text:span></text:p>
          </table:table-cell>
          <table:table-cell table:style-name="表格72.A2" office:value-type="string">
            <text:p text:style-name="P17"><text:span text:style-name="T25">O(1)</text:span></text:p>
          </table:table-cell>
          <table:table-cell table:style-name="表格72.A2" office:value-type="string">
            <text:p text:style-name="P17"><text:span text:style-name="T25">O(n)</text:span></text:p>
          </table:table-cell>
        </table:table-row>
        <table:table-row table:style-name="表格72.1">
          <table:table-cell table:style-name="表格72.A3" office:value-type="string">
            <text:p text:style-name="P16"><text:span text:style-name="T25">已排序 Array</text:span></text:p>
          </table:table-cell>
          <table:table-cell table:style-name="表格72.A3" office:value-type="string">
            <text:p text:style-name="P17"><text:span text:style-name="T25">O(1)</text:span></text:p>
          </table:table-cell>
          <table:table-cell table:style-name="表格72.A3" office:value-type="string">
            <text:p text:style-name="P17"><text:span text:style-name="T25">O(n)</text:span></text:p>
          </table:table-cell>
          <table:table-cell table:style-name="表格72.A3" office:value-type="string">
            <text:p text:style-name="P17"><text:span text:style-name="T25">O(1)</text:span></text:p>
          </table:table-cell>
        </table:table-row>
        <table:table-row table:style-name="表格72.1">
          <table:table-cell table:style-name="表格72.A2" office:value-type="string">
            <text:p text:style-name="P16"><text:span text:style-name="T25">Linked List</text:span></text:p>
          </table:table-cell>
          <table:table-cell table:style-name="表格72.A2" office:value-type="string">
            <text:p text:style-name="P17"><text:span text:style-name="T25">O(n)</text:span></text:p>
          </table:table-cell>
          <table:table-cell table:style-name="表格72.A2" office:value-type="string">
            <text:p text:style-name="P17"><text:span text:style-name="T25">O(1)</text:span></text:p>
          </table:table-cell>
          <table:table-cell table:style-name="表格72.A2" office:value-type="string">
            <text:p text:style-name="P17"><text:span text:style-name="T25">O(n)</text:span></text:p>
          </table:table-cell>
        </table:table-row>
        <table:table-row table:style-name="表格72.1">
          <table:table-cell table:style-name="表格72.A3" office:value-type="string">
            <text:p text:style-name="P16"><text:span text:style-name="T25">BST（平衡）</text:span></text:p>
          </table:table-cell>
          <table:table-cell table:style-name="表格72.A3" office:value-type="string">
            <text:p text:style-name="P17"><text:span text:style-name="T25">O(log n)</text:span></text:p>
          </table:table-cell>
          <table:table-cell table:style-name="表格72.A3" office:value-type="string">
            <text:p text:style-name="P17"><text:span text:style-name="T25">O(log n)</text:span></text:p>
          </table:table-cell>
          <table:table-cell table:style-name="表格72.A3" office:value-type="string">
            <text:p text:style-name="P17"><text:span text:style-name="T25">O(log n)</text:span></text:p>
          </table:table-cell>
        </table:table-row>
        <table:table-row table:style-name="表格72.1">
          <table:table-cell table:style-name="表格72.A2" office:value-type="string">
            <text:p text:style-name="P16"><text:span text:style-name="T44">Heap（最佳）</text:span></text:p>
          </table:table-cell>
          <table:table-cell table:style-name="表格72.A2" office:value-type="string">
            <text:p text:style-name="P17"><text:span text:style-name="T44">O(1)</text:span></text:p>
          </table:table-cell>
          <table:table-cell table:style-name="表格72.A2" office:value-type="string">
            <text:p text:style-name="P17"><text:span text:style-name="T25">O(log n)</text:span></text:p>
          </table:table-cell>
          <table:table-cell table:style-name="表格72.A2" office:value-type="string">
            <text:p text:style-name="P17"><text:span text:style-name="T25">O(log n)</text:span></text:p>
          </table:table-cell>
        </table:table-row>
      </table:table>
      <text:p text:style-name="P27"/>
      <table:table table:name="表格73" table:style-name="表格73">
        <table:table-column table:style-name="表格73.A"/>
        <table:table-row table:style-name="表格73.1">
          <table:table-cell table:style-name="表格73.A1" office:value-type="string">
            <text:p text:style-name="P19"><text:span text:style-name="T29">🔑 </text:span><text:span text:style-name="T30">口訣：Priority Queue 結論</text:span></text:p>
            <text:p text:style-name="P21"><text:span text:style-name="T31">Heap 是實作 Priority Queue 的最佳結構</text:span><text:span text:style-name="T32">：取最大/最小 O(1)，插入與刪除都 O(log n)。</text:span></text:p>
          </table:table-cell>
        </table:table-row>
      </table:table>
      <text:p text:style-name="Standard"/>
      <text:h text:style-name="P12" text:outline-level="1"><text:span text:style-name="T18">第十一章 <text:s/></text:span><text:span text:style-name="T19">排序法時間複雜度完整比較</text:span></text:h>
      <table:table table:name="表格74" table:style-name="表格74">
        <table:table-column table:style-name="表格74.A"/>
        <table:table-column table:style-name="表格74.B" table:number-columns-repeated="3"/>
        <table:table-column table:style-name="表格74.E"/>
        <table:table-column table:style-name="表格74.F"/>
        <table:table-header-rows>
          <table:table-row table:style-name="表格74.1">
            <table:table-cell table:style-name="表格74.A1" office:value-type="string">
              <text:p text:style-name="P15"><text:span text:style-name="T24">排序法</text:span></text:p>
            </table:table-cell>
            <table:table-cell table:style-name="表格74.A1" office:value-type="string">
              <text:p text:style-name="P15"><text:span text:style-name="T24">最佳</text:span></text:p>
            </table:table-cell>
            <table:table-cell table:style-name="表格74.A1" office:value-type="string">
              <text:p text:style-name="P15"><text:span text:style-name="T24">平均</text:span></text:p>
            </table:table-cell>
            <table:table-cell table:style-name="表格74.A1" office:value-type="string">
              <text:p text:style-name="P15"><text:span text:style-name="T24">最差</text:span></text:p>
            </table:table-cell>
            <table:table-cell table:style-name="表格74.A1" office:value-type="string">
              <text:p text:style-name="P15"><text:span text:style-name="T24">空間</text:span></text:p>
            </table:table-cell>
            <table:table-cell table:style-name="表格74.A1" office:value-type="string">
              <text:p text:style-name="P15"><text:span text:style-name="T24">穩定性</text:span></text:p>
            </table:table-cell>
          </table:table-row>
        </table:table-header-rows>
        <table:table-row table:style-name="表格74.1">
          <table:table-cell table:style-name="表格74.A2" office:value-type="string">
            <text:p text:style-name="P16"><text:span text:style-name="T25">Bubble Sort</text:span></text:p>
          </table:table-cell>
          <table:table-cell table:style-name="表格74.A2" office:value-type="string">
            <text:p text:style-name="P17"><text:span text:style-name="T25">O(n)</text:span></text:p>
          </table:table-cell>
          <table:table-cell table:style-name="表格74.A2" office:value-type="string">
            <text:p text:style-name="P17"><text:span text:style-name="T25">O(n²)</text:span></text:p>
          </table:table-cell>
          <table:table-cell table:style-name="表格74.A2" office:value-type="string">
            <text:p text:style-name="P17"><text:span text:style-name="T25">O(n²)</text:span></text:p>
          </table:table-cell>
          <table:table-cell table:style-name="表格74.A2" office:value-type="string">
            <text:p text:style-name="P17"><text:span text:style-name="T25">O(1)</text:span></text:p>
          </table:table-cell>
          <table:table-cell table:style-name="表格74.A2" office:value-type="string">
            <text:p text:style-name="P17"><text:span text:style-name="T35">✓ 穩定</text:span></text:p>
          </table:table-cell>
        </table:table-row>
        <table:table-row table:style-name="表格74.1">
          <table:table-cell table:style-name="表格74.A3" office:value-type="string">
            <text:p text:style-name="P16"><text:span text:style-name="T25">Selection Sort</text:span></text:p>
          </table:table-cell>
          <table:table-cell table:style-name="表格74.A3" office:value-type="string">
            <text:p text:style-name="P17"><text:span text:style-name="T25">O(n²)</text:span></text:p>
          </table:table-cell>
          <table:table-cell table:style-name="表格74.A3" office:value-type="string">
            <text:p text:style-name="P17"><text:span text:style-name="T25">O(n²)</text:span></text:p>
          </table:table-cell>
          <table:table-cell table:style-name="表格74.A3" office:value-type="string">
            <text:p text:style-name="P17"><text:span text:style-name="T25">O(n²)</text:span></text:p>
          </table:table-cell>
          <table:table-cell table:style-name="表格74.A3" office:value-type="string">
            <text:p text:style-name="P17"><text:span text:style-name="T25">O(1)</text:span></text:p>
          </table:table-cell>
          <table:table-cell table:style-name="表格74.A3" office:value-type="string">
            <text:p text:style-name="P17"><text:span text:style-name="T27">✗ 不穩定</text:span></text:p>
          </table:table-cell>
        </table:table-row>
        <table:table-row table:style-name="表格74.1">
          <table:table-cell table:style-name="表格74.A2" office:value-type="string">
            <text:p text:style-name="P16"><text:span text:style-name="T25">Insertion Sort</text:span></text:p>
          </table:table-cell>
          <table:table-cell table:style-name="表格74.A2" office:value-type="string">
            <text:p text:style-name="P17"><text:span text:style-name="T25">O(n)</text:span></text:p>
          </table:table-cell>
          <table:table-cell table:style-name="表格74.A2" office:value-type="string">
            <text:p text:style-name="P17"><text:span text:style-name="T25">O(n²)</text:span></text:p>
          </table:table-cell>
          <table:table-cell table:style-name="表格74.A2" office:value-type="string">
            <text:p text:style-name="P17"><text:span text:style-name="T25">O(n²)</text:span></text:p>
          </table:table-cell>
          <table:table-cell table:style-name="表格74.A2" office:value-type="string">
            <text:p text:style-name="P17"><text:span text:style-name="T25">O(1)</text:span></text:p>
          </table:table-cell>
          <table:table-cell table:style-name="表格74.A2" office:value-type="string">
            <text:p text:style-name="P17"><text:span text:style-name="T35">✓ 穩定</text:span></text:p>
          </table:table-cell>
        </table:table-row>
        <table:table-row table:style-name="表格74.1">
          <table:table-cell table:style-name="表格74.A3" office:value-type="string">
            <text:p text:style-name="P16"><text:span text:style-name="T25">Merge Sort</text:span></text:p>
          </table:table-cell>
          <table:table-cell table:style-name="表格74.A3" office:value-type="string">
            <text:p text:style-name="P17"><text:span text:style-name="T25">O(n log n)</text:span></text:p>
          </table:table-cell>
          <table:table-cell table:style-name="表格74.A3" office:value-type="string">
            <text:p text:style-name="P17"><text:span text:style-name="T25">O(n log n)</text:span></text:p>
          </table:table-cell>
          <table:table-cell table:style-name="表格74.A3" office:value-type="string">
            <text:p text:style-name="P17"><text:span text:style-name="T25">O(n log n)</text:span></text:p>
          </table:table-cell>
          <table:table-cell table:style-name="表格74.A3" office:value-type="string">
            <text:p text:style-name="P17"><text:span text:style-name="T25">O(n)</text:span></text:p>
          </table:table-cell>
          <table:table-cell table:style-name="表格74.A3" office:value-type="string">
            <text:p text:style-name="P17"><text:span text:style-name="T35">✓ 穩定</text:span></text:p>
          </table:table-cell>
        </table:table-row>
        <table:table-row table:style-name="表格74.1">
          <table:table-cell table:style-name="表格74.A2" office:value-type="string">
            <text:p text:style-name="P16"><text:span text:style-name="T25">Quick Sort</text:span></text:p>
          </table:table-cell>
          <table:table-cell table:style-name="表格74.A2" office:value-type="string">
            <text:p text:style-name="P17"><text:span text:style-name="T25">O(n log n)</text:span></text:p>
          </table:table-cell>
          <table:table-cell table:style-name="表格74.A2" office:value-type="string">
            <text:p text:style-name="P17"><text:span text:style-name="T25">O(n log n)</text:span></text:p>
          </table:table-cell>
          <table:table-cell table:style-name="表格74.A2" office:value-type="string">
            <text:p text:style-name="P17"><text:span text:style-name="T27">O(n²)</text:span></text:p>
          </table:table-cell>
          <table:table-cell table:style-name="表格74.A2" office:value-type="string">
            <text:p text:style-name="P17"><text:span text:style-name="T25">O(log n)</text:span></text:p>
          </table:table-cell>
          <table:table-cell table:style-name="表格74.A2" office:value-type="string">
            <text:p text:style-name="P17"><text:span text:style-name="T27">✗ 不穩定</text:span></text:p>
          </table:table-cell>
        </table:table-row>
        <table:table-row table:style-name="表格74.1">
          <table:table-cell table:style-name="表格74.A3" office:value-type="string">
            <text:p text:style-name="P16"><text:span text:style-name="T25">Heap Sort</text:span></text:p>
          </table:table-cell>
          <table:table-cell table:style-name="表格74.A3" office:value-type="string">
            <text:p text:style-name="P17"><text:span text:style-name="T25">O(n log n)</text:span></text:p>
          </table:table-cell>
          <table:table-cell table:style-name="表格74.A3" office:value-type="string">
            <text:p text:style-name="P17"><text:span text:style-name="T25">O(n log n)</text:span></text:p>
          </table:table-cell>
          <table:table-cell table:style-name="表格74.A3" office:value-type="string">
            <text:p text:style-name="P17"><text:span text:style-name="T25">O(n log n)</text:span></text:p>
          </table:table-cell>
          <table:table-cell table:style-name="表格74.A3" office:value-type="string">
            <text:p text:style-name="P17"><text:span text:style-name="T25">O(1)</text:span></text:p>
          </table:table-cell>
          <table:table-cell table:style-name="表格74.A3" office:value-type="string">
            <text:p text:style-name="P17"><text:span text:style-name="T27">✗ 不穩定</text:span></text:p>
          </table:table-cell>
        </table:table-row>
        <table:table-row table:style-name="表格74.1">
          <table:table-cell table:style-name="表格74.A2" office:value-type="string">
            <text:p text:style-name="P16"><text:span text:style-name="T25">Binary Search</text:span></text:p>
          </table:table-cell>
          <table:table-cell table:style-name="表格74.A2" office:value-type="string">
            <text:p text:style-name="P17"><text:span text:style-name="T25">O(1)</text:span></text:p>
          </table:table-cell>
          <table:table-cell table:style-name="表格74.A2" office:value-type="string">
            <text:p text:style-name="P17"><text:span text:style-name="T25">O(log n)</text:span></text:p>
          </table:table-cell>
          <table:table-cell table:style-name="表格74.A2" office:value-type="string">
            <text:p text:style-name="P17"><text:span text:style-name="T25">O(log n)</text:span></text:p>
          </table:table-cell>
          <table:table-cell table:style-name="表格74.A2" office:value-type="string">
            <text:p text:style-name="P17"><text:span text:style-name="T25">O(1)</text:span></text:p>
          </table:table-cell>
          <table:table-cell table:style-name="表格74.A2" office:value-type="string">
            <text:p text:style-name="P17"><text:span text:style-name="T25">（查詢非排序）</text:span></text:p>
          </table:table-cell>
        </table:table-row>
      </table:table>
      <text:p text:style-name="P23"/>
      <table:table table:name="表格75" table:style-name="表格75">
        <table:table-column table:style-name="表格75.A"/>
        <table:table-row table:style-name="表格75.1">
          <table:table-cell table:style-name="表格75.A1" office:value-type="string">
            <text:p text:style-name="P19"><text:span text:style-name="T29">⭐ </text:span><text:span text:style-name="T40">考試提示（三大重點排序）</text:span></text:p>
            <text:p text:style-name="P20"><text:span text:style-name="T41">Merge Sort：</text:span><text:span text:style-name="T32">唯一在所有情況都是 O(n log n) 且穩定的排序法，但需額外 O(n) 空間。</text:span></text:p>
            <text:p text:style-name="P20"><text:span text:style-name="T41">Quick Sort：</text:span><text:span text:style-name="T32">最差 O(n²) 發生在每次都選到最大或最小值當 pivot（如對已排序資料）。</text:span></text:p>
            <text:p text:style-name="P21"><text:span text:style-name="T41">Heap Sort：</text:span><text:span text:style-name="T32">原地排序（O(1) 空間）且保證 O(n log n)，但不穩定，實務效能常不如 Quick Sort。</text:span></text:p>
          </table:table-cell>
        </table:table-row>
      </table:table>
      <text:p text:style-name="Standard"/>
      <text:h text:style-name="P12" text:outline-level="1"><text:span text:style-name="T18">第十二章 <text:s/></text:span><text:span text:style-name="T19">考前速記總整理</text:span></text:h>
      <text:h text:style-name="P14" text:outline-level="2"><text:span text:style-name="T22">▍</text:span><text:span text:style-name="T23">12.1　時間複雜度大小排序</text:span></text:h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19"><text:span text:style-name="T29">⭐ </text:span><text:span text:style-name="T40">由小到大（必背）</text:span></text:p>
            <text:p text:style-name="P21"><text:span text:style-name="T41">O(1) &lt; O(log n) &lt; O(n) &lt; O(n log n) &lt; O(n²) &lt; O(2ⁿ) &lt; O(n!)</text:span></text:p>
          </table:table-cell>
        </table:table-row>
      </table:table>
      <text:h text:style-name="P14" text:outline-level="2"><text:span text:style-name="T22">▍</text:span><text:span text:style-name="T23">12.2　各結構速查表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header-rows>
          <table:table-row table:style-name="表格77.1">
            <table:table-cell table:style-name="表格77.A1" office:value-type="string">
              <text:p text:style-name="P15"><text:span text:style-name="T24">結構</text:span></text:p>
            </table:table-cell>
            <table:table-cell table:style-name="表格77.A1" office:value-type="string">
              <text:p text:style-name="P15"><text:span text:style-name="T24">核心規則</text:span></text:p>
            </table:table-cell>
            <table:table-cell table:style-name="表格77.A1" office:value-type="string">
              <text:p text:style-name="P15"><text:span text:style-name="T24">高度</text:span></text:p>
            </table:table-cell>
            <table:table-cell table:style-name="表格77.A1" office:value-type="string">
              <text:p text:style-name="P15"><text:span text:style-name="T24">最差時間</text:span>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16"><text:span text:style-name="T25">BST</text:span></text:p>
          </table:table-cell>
          <table:table-cell table:style-name="表格77.A2" office:value-type="string">
            <text:p text:style-name="P16"><text:span text:style-name="T25">左 &lt; 根 &lt; 右</text:span></text:p>
          </table:table-cell>
          <table:table-cell table:style-name="表格77.A2" office:value-type="string">
            <text:p text:style-name="P16"><text:span text:style-name="T27">O(n)（可退化）</text:span></text:p>
          </table:table-cell>
          <table:table-cell table:style-name="表格77.A2" office:value-type="string">
            <text:p text:style-name="P16"><text:span text:style-name="T25">O(n)</text:span></text:p>
          </table:table-cell>
        </table:table-row>
        <table:table-row table:style-name="表格77.1">
          <table:table-cell table:style-name="表格77.A3" office:value-type="string">
            <text:p text:style-name="P16"><text:span text:style-name="T25">AVL</text:span></text:p>
          </table:table-cell>
          <table:table-cell table:style-name="表格77.A3" office:value-type="string">
            <text:p text:style-name="P16"><text:span text:style-name="T25">│BF│ ≤ 1，BF = 左高 − 右高</text:span></text:p>
          </table:table-cell>
          <table:table-cell table:style-name="表格77.A3" office:value-type="string">
            <text:p text:style-name="P16"><text:span text:style-name="T25">O(log n)</text:span></text:p>
          </table:table-cell>
          <table:table-cell table:style-name="表格77.A3" office:value-type="string">
            <text:p text:style-name="P16"><text:span text:style-name="T25">O(log n)</text:span></text:p>
          </table:table-cell>
        </table:table-row>
        <table:table-row table:style-name="表格77.1">
          <table:table-cell table:style-name="表格77.A2" office:value-type="string">
            <text:p text:style-name="P16"><text:span text:style-name="T25">RBT</text:span></text:p>
          </table:table-cell>
          <table:table-cell table:style-name="表格77.A2" office:value-type="string">
            <text:p text:style-name="P16"><text:span text:style-name="T25">根黑、紅不接紅、黑高相同</text:span></text:p>
          </table:table-cell>
          <table:table-cell table:style-name="表格77.A2" office:value-type="string">
            <text:p text:style-name="P16"><text:span text:style-name="T25">O(log n)</text:span></text:p>
          </table:table-cell>
          <table:table-cell table:style-name="表格77.A2" office:value-type="string">
            <text:p text:style-name="P16"><text:span text:style-name="T25">O(log n)</text:span></text:p>
          </table:table-cell>
        </table:table-row>
        <table:table-row table:style-name="表格77.1">
          <table:table-cell table:style-name="表格77.A3" office:value-type="string">
            <text:p text:style-name="P16"><text:span text:style-name="T25">Heap</text:span></text:p>
          </table:table-cell>
          <table:table-cell table:style-name="表格77.A3" office:value-type="string">
            <text:p text:style-name="P16"><text:span text:style-name="T25">完全二元樹 + 父 ≥ 子（Max）</text:span></text:p>
          </table:table-cell>
          <table:table-cell table:style-name="表格77.A3" office:value-type="string">
            <text:p text:style-name="P16"><text:span text:style-name="T25">O(log n)</text:span></text:p>
          </table:table-cell>
          <table:table-cell table:style-name="表格77.A3" office:value-type="string">
            <text:p text:style-name="P16"><text:span text:style-name="T25">O(log n)（刪）</text:span></text:p>
          </table:table-cell>
        </table:table-row>
        <table:table-row table:style-name="表格77.1">
          <table:table-cell table:style-name="表格77.A2" office:value-type="string">
            <text:p text:style-name="P16"><text:span text:style-name="T25">(2,4)-Tree</text:span></text:p>
          </table:table-cell>
          <table:table-cell table:style-name="表格77.A2" office:value-type="string">
            <text:p text:style-name="P16"><text:span text:style-name="T25">節點有 1~3 鍵值，葉節點同層</text:span></text:p>
          </table:table-cell>
          <table:table-cell table:style-name="表格77.A2" office:value-type="string">
            <text:p text:style-name="P16"><text:span text:style-name="T25">O(log n)</text:span></text:p>
          </table:table-cell>
          <table:table-cell table:style-name="表格77.A2" office:value-type="string">
            <text:p text:style-name="P16"><text:span text:style-name="T25">O(log n)</text:span></text:p>
          </table:table-cell>
        </table:table-row>
      </table:table>
      <text:h text:style-name="P14" text:outline-level="2"><text:span text:style-name="T22">▍</text:span><text:span text:style-name="T23">12.3　AVL 旋轉速查</text:span></text:h>
      <table:table table:name="表格78" table:style-name="表格78">
        <table:table-column table:style-name="表格78.A"/>
        <table:table-column table:style-name="表格78.B"/>
        <table:table-column table:style-name="表格78.C"/>
        <table:table-column table:style-name="表格78.D"/>
        <table:table-header-rows>
          <table:table-row table:style-name="表格78.1">
            <table:table-cell table:style-name="表格78.A1" office:value-type="string">
              <text:p text:style-name="P15"><text:span text:style-name="T24">失衡類型</text:span></text:p>
            </table:table-cell>
            <table:table-cell table:style-name="表格78.A1" office:value-type="string">
              <text:p text:style-name="P15"><text:span text:style-name="T24">判斷方式</text:span></text:p>
            </table:table-cell>
            <table:table-cell table:style-name="表格78.A1" office:value-type="string">
              <text:p text:style-name="P15"><text:span text:style-name="T24">旋轉方式</text:span></text:p>
            </table:table-cell>
            <table:table-cell table:style-name="表格78.A1" office:value-type="string">
              <text:p text:style-name="P15"><text:span text:style-name="T24">口訣</text:span>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16"><text:span text:style-name="T25">LL</text:span></text:p>
          </table:table-cell>
          <table:table-cell table:style-name="表格78.A2" office:value-type="string">
            <text:p text:style-name="P16"><text:span text:style-name="T25">失衡 BF=+2，左子 BF=+1</text:span></text:p>
          </table:table-cell>
          <table:table-cell table:style-name="表格78.A2" office:value-type="string">
            <text:p text:style-name="P16"><text:span text:style-name="T25">右旋（一次）</text:span></text:p>
          </table:table-cell>
          <table:table-cell table:style-name="表格78.A2" office:value-type="string">
            <text:p text:style-name="P16"><text:span text:style-name="T35">LL → 右</text:span></text:p>
          </table:table-cell>
        </table:table-row>
        <table:table-row table:style-name="表格78.1">
          <table:table-cell table:style-name="表格78.A3" office:value-type="string">
            <text:p text:style-name="P16"><text:span text:style-name="T25">RR</text:span></text:p>
          </table:table-cell>
          <table:table-cell table:style-name="表格78.A3" office:value-type="string">
            <text:p text:style-name="P16"><text:span text:style-name="T25">失衡 BF=−2，右子 BF=−1</text:span></text:p>
          </table:table-cell>
          <table:table-cell table:style-name="表格78.A3" office:value-type="string">
            <text:p text:style-name="P16"><text:span text:style-name="T25">左旋（一次）</text:span></text:p>
          </table:table-cell>
          <table:table-cell table:style-name="表格78.A3" office:value-type="string">
            <text:p text:style-name="P16"><text:span text:style-name="T35">RR → 左</text:span></text:p>
          </table:table-cell>
        </table:table-row>
        <table:table-row table:style-name="表格78.1">
          <table:table-cell table:style-name="表格78.A2" office:value-type="string">
            <text:p text:style-name="P16"><text:span text:style-name="T25">LR</text:span></text:p>
          </table:table-cell>
          <table:table-cell table:style-name="表格78.A2" office:value-type="string">
            <text:p text:style-name="P16"><text:span text:style-name="T25">失衡 BF=+2，左子 BF=−1</text:span></text:p>
          </table:table-cell>
          <table:table-cell table:style-name="表格78.A2" office:value-type="string">
            <text:p text:style-name="P16"><text:span text:style-name="T25">先左旋左子，再右旋失衡節點</text:span></text:p>
          </table:table-cell>
          <table:table-cell table:style-name="表格78.A2" office:value-type="string">
            <text:p text:style-name="P16"><text:span text:style-name="T35">LR → 左右</text:span></text:p>
          </table:table-cell>
        </table:table-row>
        <table:table-row table:style-name="表格78.1">
          <table:table-cell table:style-name="表格78.A3" office:value-type="string">
            <text:p text:style-name="P16"><text:span text:style-name="T25">RL</text:span></text:p>
          </table:table-cell>
          <table:table-cell table:style-name="表格78.A3" office:value-type="string">
            <text:p text:style-name="P16"><text:span text:style-name="T25">失衡 BF=−2，右子 BF=+1</text:span></text:p>
          </table:table-cell>
          <table:table-cell table:style-name="表格78.A3" office:value-type="string">
            <text:p text:style-name="P16"><text:span text:style-name="T25">先右旋右子，再左旋失衡節點</text:span></text:p>
          </table:table-cell>
          <table:table-cell table:style-name="表格78.A3" office:value-type="string">
            <text:p text:style-name="P16"><text:span text:style-name="T35">RL → 右左</text:span></text:p>
          </table:table-cell>
        </table:table-row>
      </table:table>
      <text:p text:style-name="P26"/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9"><text:span text:style-name="T29">🔑 </text:span><text:span text:style-name="T30">口訣：AVL 旋轉再提醒</text:span></text:p>
            <text:p text:style-name="P21"><text:span text:style-name="T31">同向一刀、反向兩刀；左重右旋、右重左旋。</text:span></text:p>
          </table:table-cell>
        </table:table-row>
      </table:table>
      <text:h text:style-name="P14" text:outline-level="2"><text:span text:style-name="T22">▍</text:span><text:span text:style-name="T23">12.4　RBT 核心規則速記</text:span></text:h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19"><text:span text:style-name="T29">✅ </text:span><text:span text:style-name="T30">五規則 + 口訣</text:span></text:p>
            <text:p text:style-name="P20"><text:span text:style-name="T31">①</text:span><text:span text:style-name="T32"> 每個節點非紅即黑　</text:span><text:span text:style-name="T31">②</text:span><text:span text:style-name="T32"> 根節點是黑　</text:span><text:span text:style-name="T31">③</text:span><text:span text:style-name="T32"> NIL 空節點是黑</text:span></text:p>
            <text:p text:style-name="P20"><text:span text:style-name="T31">④</text:span><text:span text:style-name="T32"> 紅不接紅（Red→Red 違規）　</text:span><text:span text:style-name="T31">⑤</text:span><text:span text:style-name="T32"> 所有路徑黑高度相同 → 確保 h = O(log n)</text:span></text:p>
            <text:p text:style-name="P21"><text:span text:style-name="T32">口訣：</text:span><text:span text:style-name="T31">根黑、葉黑、紅不連、黑高齊。</text:span></text:p>
          </table:table-cell>
        </table:table-row>
      </table:table>
      <text:h text:style-name="P14" text:outline-level="2"><text:soft-page-break/><text:span text:style-name="T22">▍</text:span><text:span text:style-name="T23">12.5　Heap 公式速記</text:span>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9"><text:span text:style-name="T29">⭐ </text:span><text:span text:style-name="T40">陣列索引</text:span></text:p>
            <text:p text:style-name="P21"><text:span text:style-name="T41">父 = ⌊i/2⌋　左子 = 2i　右子 = 2i + 1</text:span></text:p>
          </table:table-cell>
        </table:table-row>
      </table:table>
      <text:h text:style-name="P14" text:outline-level="2"><text:span text:style-name="T22">▍</text:span><text:span text:style-name="T23">12.6　各題型答題模板</text:span></text:h>
      <text:h text:style-name="P29" text:outline-level="3"><text:span text:style-name="T43">問：BST vs AVL vs RBT 差在哪？</text:span></text:h>
      <text:p text:style-name="P13"><text:span text:style-name="T20">BST 依「左小右大」儲存，但若資料有序插入會退化成鏈結串列，搜尋退化至 O(n)。AVL 在每次插入/刪除後強制維持每個節點 │BF│ ≤ 1，透過 LL/RR/LR/RL 四種旋轉保持平衡，搜尋保證 O(log n)，但旋轉次數較多。Red-Black Tree 以五條顏色規則取代嚴格高度限制，插入/刪除旋轉次數較少（最多 2~3 次），同樣保證 O(log n)，適用於頻繁插刪的場景。</text:span></text:p>
      <text:h text:style-name="P29" text:outline-level="3"><text:span text:style-name="T43">問：為何 RBT 高度是 O(log n)？</text:span></text:h>
      <text:p text:style-name="P13"><text:span text:style-name="T20">由於「紅不接紅」且「所有路徑黑高度相同」，最長路徑為黑紅交替，不超過最短純黑路徑的兩倍。可嚴格證明樹高 h ≤ 2log₂(n+1)，故 Search、Insert、Delete 均保證 O(log n)，不會退化。</text:span></text:p>
      <text:h text:style-name="P29" text:outline-level="3"><text:span text:style-name="T43">問：(2,4)-Tree 與 RBT 的關係？</text:span></text:h>
      <text:p text:style-name="P13"><text:span text:style-name="T20">Red-Black Tree 是 (2,4)-Tree 的二元樹表示法。2-node 對應 RBT 的黑色節點，3-node 對應一黑一紅，4-node 對應黑節點左右各一紅。(2,4)-Tree 所有葉節點同層的性質，對應到 RBT 的「黑高度相同」規則。</text:span></text:p>
      <text:p text:style-name="Standard"/>
      <text:h text:style-name="P12" text:outline-level="1"><text:span text:style-name="T18">附　錄 <text:s/></text:span><text:span text:style-name="T19">一分鐘衝刺速背版</text:span></text:h>
      <text:p text:style-name="P13"><text:span text:style-name="T21">考前最後一分鐘，只看這頁。</text:span></text:p>
      <text:p text:style-name="P22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9"><text:span text:style-name="T29">✅ </text:span><text:span text:style-name="T30">BST</text:span></text:p>
            <text:p text:style-name="P20"><text:span text:style-name="T32">左 &lt; 根 &lt; 右。</text:span></text:p>
            <text:p text:style-name="P20"><text:span text:style-name="T32">刪除：葉 → 直刪　/　一子 → 接上　/　兩子 → 中序後繼。</text:span></text:p>
            <text:p text:style-name="P21"><text:span text:style-name="T32">最差 O(n)（有序插入退化）。</text:span></text:p>
          </table:table-cell>
        </table:table-row>
      </table:table>
      <text:p text:style-name="P32"/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19"><text:span text:style-name="T29">✅ </text:span><text:span text:style-name="T30">AVL</text:span></text:p>
            <text:p text:style-name="P20"><text:span text:style-name="T32">BF = 左高 − 右高，│BF│ ≤ 1。</text:span></text:p>
            <text:p text:style-name="P20"><text:span text:style-name="T32">LL→右旋　RR→左旋　LR→左右旋　RL→右左旋。</text:span></text:p>
            <text:p text:style-name="P21"><text:span text:style-name="T32">同向一刀、反向兩刀；左重右旋、右重左旋。高度保證 O(log n)。</text:span></text:p>
          </table:table-cell>
        </table:table-row>
      </table:table>
      <text:p text:style-name="P32"/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19"><text:span text:style-name="T29">✅ </text:span><text:span text:style-name="T30">RBT（紅黑樹）</text:span></text:p>
            <text:p text:style-name="P20"><text:span text:style-name="T32">① 非紅即黑　② 根黑　③ NIL黑　④ 紅不接紅　⑤ 黑高度相同。</text:span></text:p>
            <text:p text:style-name="P20"><text:span text:style-name="T32">口訣：根黑、葉黑、紅不連、黑高齊。</text:span></text:p>
            <text:p text:style-name="P21"><text:span text:style-name="T32">高度 h ≤ 2log(n+1) = O(log n)；本質 = (2,4)-Tree 的二元表示。</text:span></text:p>
          </table:table-cell>
        </table:table-row>
      </table:table>
      <text:p text:style-name="P32"/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9"><text:span text:style-name="T29">✅ </text:span><text:span text:style-name="T30">(2,4)-Tree ↔ RBT</text:span></text:p>
            <text:p text:style-name="P20"><text:span text:style-name="T32">2-node = 黑節點。</text:span></text:p>
            <text:p text:style-name="P20"><text:span text:style-name="T32">3-node = 黑 + 紅。</text:span></text:p>
            <text:p text:style-name="P20"><text:span text:style-name="T32">4-node = 黑 + 左紅 + 右紅。</text:span></text:p>
            <text:p text:style-name="P20"><text:span text:style-name="T32">Split（分裂）= 變色（兩子變黑、父變紅）+ 必要時旋轉。</text:span></text:p>
            <text:p text:style-name="P21"><text:span text:style-name="T32">轉換心法：一次只看一個 node，展開後再接回去。</text:span></text:p>
          </table:table-cell>
        </table:table-row>
      </table:table>
      <text:p text:style-name="P32"/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19"><text:span text:style-name="T29">✅ </text:span><text:span text:style-name="T30">Heap</text:span></text:p>
            <text:p text:style-name="P20"><text:span text:style-name="T32">完全二元樹 + 父 ≥ 子（Max Heap）。</text:span></text:p>
            <text:p text:style-name="P20"><text:span text:style-name="T32">父 = i/2　左 = 2i　右 = 2i+1。</text:span></text:p>
            <text:p text:style-name="P21"><text:span text:style-name="T32">插入 O(log n)　取最大 O(1)　Heap Sort = O(n log n)。</text:span></text:p>
          </table:table-cell>
        </table:table-row>
      </table:table>
      <text:p text:style-name="P32"/>
      <table:table table:name="表格87" table:style-name="表格87">
        <table:table-column table:style-name="表格87.A"/>
        <table:table-row table:style-name="表格87.1">
          <table:table-cell table:style-name="表格87.A1" office:value-type="string">
            <text:p text:style-name="P19"><text:span text:style-name="T29">✅ </text:span><text:span text:style-name="T30">Priority Queue</text:span></text:p>
            <text:p text:style-name="P20"><text:soft-page-break/><text:span text:style-name="T32">不是 FIFO，是優先權高者先出。</text:span></text:p>
            <text:p text:style-name="P21"><text:span text:style-name="T32">以 Heap 實作最佳：取最大 O(1)，插入/刪除 O(log n)。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1f2a33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1f2a33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65cm" style:contextual-spacing="false"/>
      <style:text-properties fo:color="#1b3a5c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76cm" style:contextual-spacing="false"/>
      <style:text-properties fo:color="#1b3a5c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cm" fo:margin-bottom="0.123cm" style:contextual-spacing="false"/>
      <style:text-properties fo:color="#2c4a66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c8761a" loext:opacity="100%" style:font-name-asian="Microsoft JhengHei2" style:font-family-asian="'Microsoft JhengHei'" style:font-family-generic-asian="system" style:font-pitch-asian="variable" style:font-name-complex="Microsoft JhengHei2" style:font-family-complex="'Microsoft JhengHe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‣" style:num-suffix="‣" text:bullet-char="‣">
        <style:list-level-properties text:list-level-position-and-space-mode="label-alignment">
          <style:list-level-label-alignment text:label-followed-by="listtab" fo:text-indent="-0.459cm" fo:margin-left="0.988cm"/>
        </style:list-level-properties>
        <style:text-properties fo:font-family="'Microsoft JhengHei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 fo:padding-left="0cm" fo:padding-right="0cm" fo:padding-top="0.212cm" fo:padding-bottom="0cm" fo:border-left="none" fo:border-right="none" fo:border-top="0.51pt solid #d8dee4" fo:border-bottom="none"/>
    </style:style>
    <style:style style:name="MT1" style:family="text">
      <style:text-properties fo:color="#8a929b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905cm" fo:margin-bottom="1.249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7cm" fo:margin-left="0cm" fo:margin-right="0cm" fo:margin-top="0.69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資料結構終極衝刺筆記　‧　</text:span><text:page-number text:select-page="current">2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資料結構終極衝刺筆記</dc:title>
    <meta:initial-creator>資料結構衝刺筆記</meta:initial-creator>
    <meta:editing-cycles>2</meta:editing-cycles>
    <meta:creation-date>2026-06-26T16:08:11.014000000</meta:creation-date>
    <dc:date>2026-06-27T00:49:45.054927700</dc:date>
    <meta:editing-duration>PT6M46S</meta:editing-duration>
    <meta:document-statistic meta:table-count="87" meta:image-count="0" meta:object-count="0" meta:page-count="29" meta:paragraph-count="885" meta:word-count="9933" meta:character-count="18462" meta:non-whitespace-character-count="13440"/>
    <meta:generator>LibreOffice/26.2.4.2$Windows_X86_64 LibreOffice_project/0229ac93fcf0d7cbc6376066c6f35021cef002dc</meta:generator>
  </office:meta>
</office:document-meta>
</file>