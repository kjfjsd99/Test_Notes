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13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23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106cm" fo:margin-bottom="0.106cm" style:contextual-spacing="false"/>
    </style:style>
    <style:style style:name="P26" style:family="paragraph" style:parent-style-name="Standard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035cm" fo:margin-bottom="0.035cm" style:contextual-spacing="false"/>
    </style:style>
    <style:style style:name="P28" style:family="paragraph" style:parent-style-name="Standard">
      <style:paragraph-properties fo:margin-top="0.071cm" fo:margin-bottom="0.035cm" style:contextual-spacing="false"/>
    </style:style>
    <style:style style:name="P29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top="0.035cm" fo:margin-bottom="0.071cm" style:contextual-spacing="false"/>
    </style:style>
    <style:style style:name="P31" style:family="paragraph" style:parent-style-name="Standard">
      <style:paragraph-properties fo:margin-top="0cm" fo:margin-bottom="0.035cm" style:contextual-spacing="false"/>
    </style:style>
    <style:style style:name="P32" style:family="paragraph" style:parent-style-name="Standard">
      <style:paragraph-properties fo:margin-top="0.353cm" fo:margin-bottom="0.141cm" style:contextual-spacing="false"/>
    </style:style>
    <style:style style:name="P33" style:family="paragraph" style:parent-style-name="Standard">
      <style:paragraph-properties fo:margin-top="0.071cm" fo:margin-bottom="0.018cm" style:contextual-spacing="false"/>
    </style:style>
    <style:style style:name="P34" style:family="paragraph" style:parent-style-name="Standard">
      <style:paragraph-properties fo:margin-top="0cm" fo:margin-bottom="0.018cm" style:contextual-spacing="false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018cm" fo:margin-bottom="0.018cm" style:contextual-spacing="false"/>
    </style:style>
    <style:style style:name="P37" style:family="paragraph" style:parent-style-name="Standard">
      <style:paragraph-properties fo:margin-top="0.018cm" fo:margin-bottom="0.071cm" style:contextual-spacing="false"/>
    </style:style>
    <style:style style:name="P38" style:family="paragraph" style:parent-style-name="Standard">
      <style:paragraph-properties fo:margin-top="0.018cm" fo:margin-bottom="0.035cm" style:contextual-spacing="false"/>
    </style:style>
    <style:style style:name="P39" style:family="paragraph" style:parent-style-name="Standard">
      <style:paragraph-properties fo:margin-top="0.035cm" fo:margin-bottom="0.018cm" style:contextual-spacing="false"/>
    </style:style>
    <style:style style:name="P40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41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42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43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44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45" style:family="paragraph" style:parent-style-name="Standard">
      <style:text-properties fo:color="#444444" loext:opacity="100%" style:font-name="Arial" fo:font-size="11pt" fo:background-color="#ffff00" style:font-name-asian="Arial2" style:font-size-asian="11pt"/>
    </style:style>
    <style:style style:name="P46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47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48" style:family="paragraph" style:parent-style-name="Standard"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49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51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52" style:family="paragraph" style:parent-style-name="Standard">
      <style:text-properties fo:color="#22b14c" loext:opacity="100%" style:font-name="Courier New" fo:font-size="10pt" style:font-name-asian="Courier New1" style:font-size-asian="10pt"/>
    </style:style>
    <style:style style:name="P53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4" style:family="paragraph" style:parent-style-name="Standard">
      <style:text-properties fo:color="#22b14c" loext:opacity="100%" style:font-name="Arial" fo:font-size="11pt" fo:font-weight="bold" style:font-name-asian="Arial2" style:font-size-asian="11pt" style:font-weight-asian="bold"/>
    </style:style>
    <style:style style:name="P55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6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7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/>
    </style:style>
    <style:style style:name="P58" style:family="paragraph" style:parent-style-name="Standard">
      <style:text-properties fo:color="#c00000" loext:opacity="100%" style:font-name="Arial" fo:font-size="11pt" style:font-name-asian="Arial2" style:font-size-asian="11pt"/>
    </style:style>
    <style:style style:name="P59" style:family="paragraph" style:parent-style-name="Standard">
      <style:paragraph-properties fo:margin-top="0.106cm" fo:margin-bottom="0.035cm" style:contextual-spacing="false"/>
    </style:style>
    <style:style style:name="P60" style:family="paragraph" style:parent-style-name="Standard">
      <style:paragraph-properties fo:margin-top="0cm" fo:margin-bottom="0.071cm" style:contextual-spacing="false"/>
    </style:style>
    <style:style style:name="P61" style:family="paragraph" style:parent-style-name="Standard">
      <style:text-properties fo:color="#ffff00" loext:opacity="100%" style:font-name="Arial" fo:font-size="11pt" fo:font-weight="bold" fo:background-color="#651fff" style:font-name-asian="Arial2" style:font-size-asian="11pt" style:font-weight-asian="bold"/>
    </style:style>
    <style:style style:name="P62" style:family="paragraph" style:parent-style-name="Standard">
      <style:text-properties fo:color="#c6ff00" loext:opacity="100%" style:font-name="Arial" fo:font-size="11pt" fo:font-weight="bold" fo:background-color="#f50057" style:font-name-asian="Arial2" style:font-size-asian="11pt" style:font-weight-asian="bold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7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8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0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4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6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7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9" style:family="text">
      <style:text-properties fo:color="#1a6b72" loext:opacity="100%" style:font-name="Arial" fo:font-size="13pt" fo:font-weight="bold" style:font-name-asian="Arial2" style:font-size-asian="13pt" style:font-weight-asian="bold"/>
    </style:style>
    <style:style style:name="T40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1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2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3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4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6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47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48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9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50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2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3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4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5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56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58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59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1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2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3" style:family="text">
      <style:text-properties fo:color="#444444" loext:opacity="100%" style:font-name="Arial" fo:font-size="9pt" style:font-size-asian="9pt" style:font-name-complex="Arial2" style:font-size-complex="9pt"/>
    </style:style>
    <style:style style:name="T64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5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6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69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0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1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4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5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78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79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80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1" style:family="text">
      <style:text-properties fo:color="#c9211e" loext:opacity="100%" fo:font-weight="bold" fo:background-color="#ffc400" loext:char-shading-value="0" style:font-weight-asian="bold" style:font-weight-complex="bold"/>
    </style:style>
    <style:style style:name="T82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83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4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5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6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7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88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89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90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91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2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3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4" style:family="text">
      <style:text-properties fo:color="#ff3d00" loext:opacity="100%" fo:background-color="#64ffda" loext:char-shading-value="0"/>
    </style:style>
    <style:style style:name="T9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6" style:family="text">
      <style:text-properties fo:color="#18ffff" loext:opacity="100%"/>
    </style:style>
    <style:style style:name="T97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8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9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00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101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2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03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04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105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6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9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0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11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12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13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14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15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6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17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18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19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0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21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22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3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24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25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27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8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9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30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1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2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33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4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36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37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38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39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40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1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42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3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4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45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46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47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8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49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0" style:family="text">
      <style:text-properties fo:color="#ffd740" loext:opacity="100%" fo:background-color="#651fff" loext:char-shading-value="0"/>
    </style:style>
    <style:style style:name="T151" style:family="text">
      <style:text-properties fo:color="#ffd740" loext:opacity="100%" fo:font-weight="bold" fo:background-color="#651fff" loext:char-shading-value="0" style:font-weight-asian="bold" style:font-weight-complex="bold"/>
    </style:style>
    <style:style style:name="T152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53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54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55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56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57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8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59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60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61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62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63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64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65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66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67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68" style:family="text">
      <style:text-properties fo:color="#76ff03" loext:opacity="100%" fo:font-weight="bold" fo:background-color="#ffff00" loext:char-shading-value="0" style:font-weight-asian="bold" style:font-weight-complex="bold"/>
    </style:style>
    <style:style style:name="T16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70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71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72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3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74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5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76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77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78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79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80" style:family="text">
      <style:text-properties fo:color="#ff4081" loext:opacity="100%" fo:font-weight="bold" fo:background-color="#3d5afe" loext:char-shading-value="0" style:font-weight-asian="bold" style:font-weight-complex="bold"/>
    </style:style>
    <style:style style:name="T181" style:family="text">
      <style:text-properties fo:color="#ff4081" loext:opacity="100%" fo:font-weight="bold" fo:background-color="#616161" loext:char-shading-value="0" style:font-weight-asian="bold" style:font-weight-complex="bold"/>
    </style:style>
    <style:style style:name="T182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183" style:family="text">
      <style:text-properties fo:color="#ff4081" loext:opacity="100%" fo:font-weight="bold" fo:background-color="#757575" loext:char-shading-value="0" style:font-weight-asian="bold" style:font-weight-complex="bold"/>
    </style:style>
    <style:style style:name="T184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85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6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87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88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89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90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91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92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93" style:family="text">
      <style:text-properties fo:color="#c6ff00" loext:opacity="100%" fo:background-color="#3d5afe" loext:char-shading-value="0"/>
    </style:style>
    <style:style style:name="T194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195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96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197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98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9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200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01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202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203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4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5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6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7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08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209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10" style:family="text">
      <style:text-properties fo:background-color="#ffff00" loext:char-shading-value="0"/>
    </style:style>
    <style:style style:name="T211" style:family="text">
      <style:text-properties fo:background-color="#ffff00" loext:char-shading-value="0"/>
    </style:style>
    <style:style style:name="T212" style:family="text">
      <style:text-properties fo:background-color="#ff1744" loext:char-shading-value="0"/>
    </style:style>
    <style:style style:name="T213" style:family="text">
      <style:text-properties fo:background-color="#ff1744" loext:char-shading-value="0"/>
    </style:style>
    <style:style style:name="T214" style:family="text">
      <style:text-properties fo:font-weight="bold" fo:background-color="#ff1744" loext:char-shading-value="0" style:font-weight-asian="bold" style:font-weight-complex="bold"/>
    </style:style>
    <style:style style:name="T215" style:family="text">
      <style:text-properties fo:font-weight="bold" fo:background-color="#ffc400" loext:char-shading-value="0" style:font-weight-asian="bold" style:font-weight-complex="bold"/>
    </style:style>
    <style:style style:name="T216" style:family="text">
      <style:text-properties fo:font-weight="bold" fo:background-color="#ffff00" loext:char-shading-value="0" style:font-weight-asian="bold" style:font-weight-complex="bold"/>
    </style:style>
    <style:style style:name="T217" style:family="text">
      <style:text-properties fo:font-weight="bold" fo:background-color="#ffd740" loext:char-shading-value="0" style:font-weight-asian="bold" style:font-weight-complex="bold"/>
    </style:style>
    <style:style style:name="T218" style:family="text">
      <style:text-properties fo:background-color="#ffd740" loext:char-shading-value="0"/>
    </style:style>
    <style:style style:name="T219" style:family="text">
      <style:text-properties fo:background-color="#ffd740" loext:char-shading-value="0"/>
    </style:style>
    <style:style style:name="T220" style:family="text">
      <style:text-properties fo:background-color="#3d5afe" loext:char-shading-value="0"/>
    </style:style>
    <style:style style:name="T221" style:family="text">
      <style:text-properties fo:background-color="#3d5afe" loext:char-shading-value="0"/>
    </style:style>
    <style:style style:name="T222" style:family="text">
      <style:text-properties fo:background-color="#64ffda" loext:char-shading-value="0"/>
    </style:style>
    <style:style style:name="T223" style:family="text">
      <style:text-properties fo:background-color="#64ffda" loext:char-shading-value="0"/>
    </style:style>
    <style:style style:name="T224" style:family="text">
      <style:text-properties fo:background-color="#651fff" loext:char-shading-value="0"/>
    </style:style>
    <style:style style:name="T225" style:family="text">
      <style:text-properties fo:background-color="#651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 loext:marker-style-name="T2"><text:span text:style-name="T1">運算式樹 </text:span><text:span text:style-name="T7">Expression Tree</text:span></text:p>
            <text:p text:style-name="P17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13" text:outline-level="1" loext:marker-style-name="T13"><text:span text:style-name="T12">第一部分：基本定義</text:span><text:span text:style-name="T13"/></text:h>
      <text:p text:style-name="P2"/>
      <text:h text:style-name="P12" text:outline-level="2" loext:marker-style-name="T30"><text:span text:style-name="T29">什麼是運算式樹 </text:span><text:span text:style-name="T30">(Expression Tree)</text:span><text:span text:style-name="T29">？</text:span></text:h>
      <text:p text:style-name="P25" loext:marker-style-name="T47"><text:span text:style-name="T46">運算式樹是一種特殊的二元樹，用來表示算術或邏輯運算式。它把整個算式的結構以樹狀方式呈現，讓電腦能清楚理解每一個運算的先後順序。</text:span><text:span text:style-name="T47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4"><text:span text:style-name="T33">核心規則（考試必記）</text:span><text:span text:style-name="T34"/></text:p>
            <text:p text:style-name="P5" loext:marker-style-name="T47"><text:span text:style-name="T64">• </text:span><text:span text:style-name="T79">葉節點 </text:span><text:span text:style-name="T80">(Leaf Node)</text:span><text:span text:style-name="T79">：存放 運算元 </text:span><text:span text:style-name="T80">(Operand)</text:span><text:span text:style-name="T46">，例如 </text:span><text:span text:style-name="T64">A</text:span><text:span text:style-name="T46">、</text:span><text:span text:style-name="T64">B</text:span><text:span text:style-name="T46">、</text:span><text:span text:style-name="T64">3</text:span><text:span text:style-name="T46">、</text:span><text:span text:style-name="T64">5</text:span></text:p>
            <text:p text:style-name="P5" loext:marker-style-name="T47"><text:span text:style-name="T64">• </text:span><text:span text:style-name="T83">內部節點 </text:span><text:span text:style-name="T88">(Internal Node)</text:span><text:span text:style-name="T83">：存放 運算子 </text:span><text:span text:style-name="T88">(Operator)</text:span><text:span text:style-name="T46">，例如 </text:span><text:span text:style-name="T64">+</text:span><text:span text:style-name="T46">、</text:span><text:span text:style-name="T64">-</text:span><text:span text:style-name="T46">、</text:span><text:span text:style-name="T64">×</text:span><text:span text:style-name="T46">、</text:span><text:span text:style-name="T64">÷</text:span></text:p>
            <text:p text:style-name="P5" loext:marker-style-name="T47"><text:span text:style-name="T64">•</text:span><text:span text:style-name="T97"> </text:span><text:span text:style-name="T112">通常是 </text:span><text:span text:style-name="T113">Full Binary Tree</text:span><text:span text:style-name="T46">（每個節點恰好有 </text:span><text:span text:style-name="T64">0 </text:span><text:span text:style-name="T46">或 </text:span><text:span text:style-name="T64">2 </text:span><text:span text:style-name="T46">個子節點）</text:span></text:p>
            <text:p text:style-name="P5" loext:marker-style-name="T117"><text:span text:style-name="T114">• </text:span><text:span text:style-name="T116">若允許一元運算子（如 </text:span><text:span text:style-name="T114">sin</text:span><text:span text:style-name="T116">、</text:span><text:span text:style-name="T114">sqrt</text:span><text:span text:style-name="T116">），則不一定是 </text:span><text:span text:style-name="T114">Full Binary Tree</text:span></text:p>
          </table:table-cell>
        </table:table-row>
      </table:table>
      <text:p text:style-name="P6"/>
      <text:h text:style-name="P12" text:outline-level="2" loext:marker-style-name="T30"><text:span text:style-name="T29">範例：</text:span><text:span text:style-name="T30">(A+B)×C </text:span><text:span text:style-name="T29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 loext:marker-style-name="T24"><text:span text:style-name="T24"><text:s text:c="7"/>×</text:span><text:span text:style-name="T24"/></text:p>
            <text:p text:style-name="P19" loext:marker-style-name="T25"><text:span text:style-name="T25"><text:s text:c="6"/>/ \</text:span><text:span text:style-name="T25"/></text:p>
            <text:p text:style-name="P19" loext:marker-style-name="T25"><text:span text:style-name="T25"><text:s text:c="25"/>+ <text:s text:c="2"/>C <text:s text:c="3"/>← 葉節點（運算元）</text:span><text:span text:style-name="T25"/></text:p>
            <text:p text:style-name="P20" loext:marker-style-name="T25"><text:span text:style-name="T25"><text:s text:c="4"/>/ \</text:span><text:span text:style-name="T25"/></text:p>
            <text:p text:style-name="P20" loext:marker-style-name="T25"><text:span text:style-name="T25"><text:s text:c="22"/>A <text:s text:c="2"/>B <text:s/>← 葉節點（運算元）</text:span><text:span text:style-name="T25"/></text:p>
            <text:p text:style-name="P7" loext:marker-style-name="T36"><text:span text:style-name="T130">× </text:span><text:span text:style-name="T131">和 </text:span><text:span text:style-name="T130">+ </text:span><text:span text:style-name="T131">是內部節點（運算子）</text:span><text:span text:style-name="T35">；</text:span><text:span text:style-name="T90">A</text:span><text:span text:style-name="T85">、</text:span><text:span text:style-name="T90">B</text:span><text:span text:style-name="T85">、</text:span><text:span text:style-name="T90">C </text:span><text:span text:style-name="T85">是葉節點（運算元）</text:span></text:p>
          </table:table-cell>
        </table:table-row>
      </table:table>
      <text:p text:style-name="P6"/>
      <text:p text:style-name="Standard"/>
      <text:h text:style-name="P14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25" loext:marker-style-name="T47"><text:span text:style-name="T46">這是 </text:span><text:span text:style-name="T64">Expression Tree </text:span><text:span text:style-name="T46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38"><text:span text:style-name="T136">Preorder</text:span><text:span text:style-name="T137">（</text:span><text:span text:style-name="T148">前序</text:span><text:span text:style-name="T137">）</text:span></text:p>
          </table:table-cell>
          <table:table-cell table:style-name="表格4.A2" office:value-type="string">
            <text:p text:style-name="Standard" loext:marker-style-name="T153"><text:span text:style-name="T152">根 → 左 → 右</text:span><text:span text:style-name="T153"/></text:p>
          </table:table-cell>
          <table:table-cell table:style-name="表格4.A2" office:value-type="string">
            <text:p text:style-name="Standard" loext:marker-style-name="T138"><text:span text:style-name="T100">Pre</text:span><text:span text:style-name="T136">fix</text:span><text:span text:style-name="T137">（前置表示法）</text:span></text:p>
          </table:table-cell>
          <table:table-cell table:style-name="表格4.A2" office:value-type="string">
            <text:p text:style-name="Standard" loext:marker-style-name="T138"><text:span text:style-name="T137">第一個元素就是根</text:span><text:span text:style-name="T138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21"><text:span text:style-name="T126">Inorder</text:span><text:span text:style-name="T120">（</text:span><text:span text:style-name="T148">中序</text:span><text:span text:style-name="T120">）</text:span></text:p>
          </table:table-cell>
          <table:table-cell table:style-name="表格4.A3" office:value-type="string">
            <text:p text:style-name="Standard" loext:marker-style-name="T163"><text:span text:style-name="T162">左 → 根 → 右</text:span><text:span text:style-name="T163"/></text:p>
          </table:table-cell>
          <table:table-cell table:style-name="表格4.A3" office:value-type="string">
            <text:p text:style-name="Standard" loext:marker-style-name="T121"><text:span text:style-name="T100">In</text:span><text:span text:style-name="T126">fix</text:span><text:span text:style-name="T120">（中置表示法）</text:span></text:p>
          </table:table-cell>
          <table:table-cell table:style-name="表格4.A3" office:value-type="string">
            <text:p text:style-name="P29" loext:marker-style-name="T121"/>
          </table:table-cell>
        </table:table-row>
        <table:table-row table:style-name="表格4.1">
          <table:table-cell table:style-name="表格4.A4" office:value-type="string">
            <text:p text:style-name="Standard" loext:marker-style-name="T36"><text:span text:style-name="T42">Postorder</text:span><text:span text:style-name="T35">（</text:span><text:span text:style-name="T148">後序</text:span><text:span text:style-name="T35">）</text:span></text:p>
          </table:table-cell>
          <table:table-cell table:style-name="表格4.A4" office:value-type="string">
            <text:p text:style-name="Standard" loext:marker-style-name="T103"><text:span text:style-name="T102">左 → 右 → 根</text:span><text:span text:style-name="T103"/></text:p>
          </table:table-cell>
          <table:table-cell table:style-name="表格4.A4" office:value-type="string">
            <text:p text:style-name="Standard" loext:marker-style-name="T36"><text:span text:style-name="T100">Post</text:span><text:span text:style-name="T42">fix</text:span><text:span text:style-name="T35">（後置表示法）</text:span></text:p>
          </table:table-cell>
          <table:table-cell table:style-name="表格4.A4" office:value-type="string">
            <text:p text:style-name="Standard" loext:marker-style-name="T36"><text:span text:style-name="T35">最後才記錄根節點</text:span><text:span text:style-name="T36"/></text:p>
          </table:table-cell>
        </table:table-row>
      </table:table>
      <text:p text:style-name="P6"/>
      <text:h text:style-name="P12" text:outline-level="2" loext:marker-style-name="T30"><text:span text:style-name="T29">記憶口訣（考試當場不忘）</text:span><text:span text:style-name="T30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40"><text:span text:style-name="T143">Preorder</text:span><text:span text:style-name="T139">（前序）：進房間立刻簽到 → 先記根，再走左右</text:span></text:p>
            <text:p text:style-name="P5" loext:marker-style-name="T119"><text:span text:style-name="T115">Inorder</text:span><text:span text:style-name="T118">（中序）：先進左房間，才簽到，再進右房間</text:span></text:p>
            <text:p text:style-name="P9" loext:marker-style-name="T34"><text:span text:style-name="T44">Postorder</text:span><text:span text:style-name="T33">（後序）：所有房間都查完，最後才簽退 → 根最後記錄</text:span></text:p>
          </table:table-cell>
        </table:table-row>
      </table:table>
      <text:p text:style-name="P6"/>
      <text:h text:style-name="P12" text:outline-level="2" loext:marker-style-name="T30"><text:span text:style-name="T29">重要注意事項：</text:span><text:span text:style-name="T30">Inorder </text:span><text:span text:style-name="T29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71"><text:span text:style-name="T170">「中序走訪 </text:span><text:span text:style-name="T173">= </text:span><text:span text:style-name="T170">原始算式」這個說法並不完全準確！</text:span></text:p>
            <text:p text:style-name="P5" loext:marker-style-name="T47"><text:span text:style-name="T46">範例：樹的根為 </text:span><text:span text:style-name="T64">×</text:span><text:span text:style-name="T46">，左子樹為 </text:span><text:span text:style-name="T64">(A+B)</text:span><text:span text:style-name="T46">，右子樹為 </text:span><text:span text:style-name="T64">C</text:span></text:p>
            <text:p text:style-name="P5" loext:marker-style-name="T175"><text:span text:style-name="T175">中序走訪結果：A+B×C（少了括號！）</text:span><text:span text:style-name="T175"/></text:p>
            <text:p text:style-name="P9" loext:marker-style-name="T144"><text:span text:style-name="T144">原始算式應為：(A+B)×C（有括號才正確）</text:span><text:span text:style-name="T144"/></text:p>
            <text:p text:style-name="P31" loext:marker-style-name="T47"><text:span text:style-name="T46">結論：</text:span><text:span text:style-name="T106">中序走訪還原原式時，必要時需補上括號</text:span><text:span text:style-name="T46">，考試要特別留意。</text:span></text:p>
          </table:table-cell>
        </table:table-row>
      </table:table>
      <text:p text:style-name="Standard"/>
      <text:h text:style-name="P14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25" loext:marker-style-name="T47"><text:span text:style-name="T46">核心原則只有一句：</text:span><text:span text:style-name="T47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19"><text:span text:style-name="T18">「</text:span><text:span text:style-name="T176">找最後執行的運算子</text:span><text:span text:style-name="T18">，</text:span><text:span text:style-name="T87">它就是目前子樹的根節點</text:span><text:span text:style-name="T18">。」</text:span></text:p>
          </table:table-cell>
        </table:table-row>
      </table:table>
      <text:p text:style-name="P6"/>
      <text:h text:style-name="P12" text:outline-level="2" loext:marker-style-name="T30"><text:span text:style-name="T30">112</text:span><text:span text:style-name="T29">題實戰：</text:span><text:span text:style-name="T31">A/B-C+D×E-A×C</text:span><text:span text:style-name="T30"> → </text:span><text:span text:style-name="T29">建樹步驟</text:span></text:h>
      <text:p text:style-name="P25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1</text:span></text:p>
          </table:table-cell>
          <table:table-cell table:style-name="表格8.A2" office:value-type="string">
            <text:p text:style-name="P5" loext:marker-style-name="T53"><text:span text:style-name="T104">找高優先權運算</text:span><text:span text:style-name="T52">（</text:span><text:span text:style-name="T177">乘除先</text:span><text:span text:style-name="T52">）</text:span></text:p>
          </table:table-cell>
          <table:table-cell table:style-name="表格8.A2" office:value-type="string">
            <text:p text:style-name="P5" loext:marker-style-name="T68"><text:span text:style-name="T68">圈出：</text:span><text:span text:style-name="T184">(A/B)</text:span><text:span text:style-name="T68">、</text:span><text:span text:style-name="T184">(D×E)</text:span><text:span text:style-name="T68">、</text:span><text:span text:style-name="T184">(A×C)</text:span></text:p>
            <text:p text:style-name="P5" loext:marker-style-name="T68"><text:span text:style-name="T68">整理：(A/B)-C+(D×E)-(A×C)</text:span><text:span text:style-name="T68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2</text:span></text:p>
          </table:table-cell>
          <table:table-cell table:style-name="表格8.A3" office:value-type="string">
            <text:p text:style-name="P5" loext:marker-style-name="T155"><text:span text:style-name="T154">找最後執行的運算子</text:span><text:span text:style-name="T155"/></text:p>
          </table:table-cell>
          <table:table-cell table:style-name="表格8.A3" office:value-type="string">
            <text:p text:style-name="P5" loext:marker-style-name="T68"><text:span text:style-name="T68">加減同優先，從左往右：</text:span><text:span text:style-name="T68"/></text:p>
            <text:p text:style-name="P5" loext:marker-style-name="T68"><text:span text:style-name="T68">①(A/B)-C <text:s/>②①+(D×E) <text:s/>③②-(A×C)</text:span><text:span text:style-name="T68"/></text:p>
            <text:p text:style-name="P5" loext:marker-style-name="T91"><text:span text:style-name="T91">最後是 [ - ]，所以樹根 = -</text:span><text:span text:style-name="T91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3</text:span></text:p>
          </table:table-cell>
          <table:table-cell table:style-name="表格8.A2" office:value-type="string">
            <text:p text:style-name="P5" loext:marker-style-name="T187"><text:span text:style-name="T186">切左右子樹</text:span><text:span text:style-name="T187"/></text:p>
          </table:table-cell>
          <table:table-cell table:style-name="表格8.A2" office:value-type="string">
            <text:p text:style-name="P5" loext:marker-style-name="T69"><text:span text:style-name="T69">左子樹：((A/B)-C)+(D×E)</text:span><text:span text:style-name="T69"/></text:p>
            <text:p text:style-name="P5" loext:marker-style-name="T69"><text:span text:style-name="T69">右子樹：(A×C)</text:span><text:span text:style-name="T69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4</text:span></text:p>
          </table:table-cell>
          <table:table-cell table:style-name="表格8.A3" office:value-type="string">
            <text:p text:style-name="P5" loext:marker-style-name="T53"><text:span text:style-name="T52">遞迴處理左子樹</text:span><text:span text:style-name="T53"/></text:p>
          </table:table-cell>
          <table:table-cell table:style-name="表格8.A3" office:value-type="string">
            <text:p text:style-name="P5" loext:marker-style-name="T68"><text:span text:style-name="T188">左子樹最後算 +，再往下拆</text:span><text:span text:style-name="T68">：</text:span></text:p>
            <text:p text:style-name="P5" loext:marker-style-name="T69"><text:span text:style-name="T69">左：(A/B)-C，右：D×E</text:span><text:span text:style-name="T69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5</text:span></text:p>
          </table:table-cell>
          <table:table-cell table:style-name="表格8.A2" office:value-type="string">
            <text:p text:style-name="P5" loext:marker-style-name="T53"><text:span text:style-name="T52">遞迴處理 </text:span><text:span text:style-name="T73">(A/B)-C</text:span></text:p>
          </table:table-cell>
          <table:table-cell table:style-name="表格8.A2" office:value-type="string">
            <text:p text:style-name="P5" loext:marker-style-name="T68"><text:span text:style-name="T188">最後算 -</text:span><text:span text:style-name="T68">，</text:span><text:span text:style-name="T69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6</text:span></text:p>
          </table:table-cell>
          <table:table-cell table:style-name="表格8.A3" office:value-type="string">
            <text:p text:style-name="P5" loext:marker-style-name="T53"><text:span text:style-name="T52">處理 </text:span><text:span text:style-name="T73">A/B</text:span></text:p>
          </table:table-cell>
          <table:table-cell table:style-name="表格8.A3" office:value-type="string">
            <text:p text:style-name="P5" loext:marker-style-name="T68"><text:span text:style-name="T188">最後算 /</text:span><text:span text:style-name="T68">，</text:span><text:span text:style-name="T69">左：A，右：B</text:span></text:p>
          </table:table-cell>
        </table:table-row>
      </table:table>
      <text:p text:style-name="P10"/>
      <text:p text:style-name="P32" loext:marker-style-name="T125"><text:span text:style-name="T128">112</text:span><text:span text:style-name="T124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 loext:marker-style-name="T26"><text:span text:style-name="T26"><text:s text:c="15"/>- <text:s text:c="9"/>&lt;- 根節點（最後執行）</text:span><text:span text:style-name="T26"/></text:p>
            <text:p text:style-name="P34" loext:marker-style-name="T26"><text:span text:style-name="T26"><text:s text:c="13"/>/ <text:s text:c="2"/>\</text:span><text:span text:style-name="T26"/></text:p>
            <text:p text:style-name="P34" loext:marker-style-name="T26"><text:span text:style-name="T26"><text:s text:c="12"/>+ <text:s text:c="4"/>*</text:span><text:span text:style-name="T26"/></text:p>
            <text:p text:style-name="P34" loext:marker-style-name="T26"><text:span text:style-name="T26"><text:s text:c="11"/>/ \ <text:s text:c="2"/>/ \</text:span><text:span text:style-name="T26"/></text:p>
            <text:p text:style-name="P34" loext:marker-style-name="T26"><text:span text:style-name="T26"><text:s text:c="10"/>- <text:s text:c="2"/>* A <text:s text:c="2"/>C</text:span><text:span text:style-name="T26"/></text:p>
            <text:p text:style-name="P34" loext:marker-style-name="T26"><text:span text:style-name="T26"><text:s text:c="9"/>/ \ / \</text:span><text:span text:style-name="T26"/></text:p>
            <text:p text:style-name="P34" loext:marker-style-name="T26"><text:span text:style-name="T26"><text:s text:c="8"/>/ <text:s/>C D <text:s text:c="2"/>E</text:span><text:span text:style-name="T26"/></text:p>
            <text:p text:style-name="P34" loext:marker-style-name="T26"><text:span text:style-name="T26"><text:s text:c="7"/>/ \</text:span><text:span text:style-name="T26"/></text:p>
            <text:p text:style-name="P35" loext:marker-style-name="T26"><text:span text:style-name="T26"><text:s text:c="6"/>A <text:s text:c="2"/>B</text:span><text:span text:style-name="T26"/></text:p>
          </table:table-cell>
        </table:table-row>
      </table:table>
      <text:p text:style-name="P10"/>
      <text:p text:style-name="P32" loext:marker-style-name="T125"><text:span text:style-name="T128">112</text:span><text:span text:style-name="T124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39">前序 </text:span><text:span text:style-name="T143">(Preorder)</text:span><text:span text:style-name="T139">：</text:span><text:span text:style-name="T25"> <text:s/>-+-/ABC×DE×AC</text:span></text:p>
            <text:p text:style-name="P5"><text:span text:style-name="T33">後序 </text:span><text:span text:style-name="T44">(Postorder)</text:span><text:span text:style-name="T33">：</text:span><text:span text:style-name="T25"> <text:s/>AB/C-DE×+AC×-</text:span></text:p>
            <text:p text:style-name="P9"><text:span text:style-name="T118">中序 </text:span><text:span text:style-name="T115">(Inorder)</text:span><text:span text:style-name="T118">：</text:span><text:span text:style-name="T25"> <text:s/>A/B-C+D×E-A×C <text:s/>（還原為原始算式）</text:span></text:p>
            <text:p text:style-name="P31" loext:marker-style-name="T55"><text:span text:style-name="T74">★ </text:span><text:span text:style-name="T54">圖片原始標示：前序 </text:span><text:span text:style-name="T74">+-/ABC*DE*AC</text:span><text:span text:style-name="T54">，後序 </text:span><text:span text:style-name="T74">AB/C-DE*+AC*-</text:span><text:span text:style-name="T54">（與上方一致，</text:span><text:span text:style-name="T74">× </text:span><text:span text:style-name="T54">以 </text:span><text:span text:style-name="T74">* </text:span><text:span text:style-name="T54">符號表示）</text:span></text:p>
          </table:table-cell>
        </table:table-row>
      </table:table>
      <text:p text:style-name="Standard"><text:soft-page-break/></text:p>
      <text:h text:style-name="P14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25" loext:marker-style-name="T47"><text:span text:style-name="T64">Postfix</text:span><text:span text:style-name="T46">（後置式）最大的優點：</text:span><text:span text:style-name="T48">不需要括號</text:span><text:span text:style-name="T46">，</text:span><text:span text:style-name="T49">不需要考慮優先權</text:span><text:span text:style-name="T46">，</text:span><text:span text:style-name="T106">只要用 </text:span><text:span text:style-name="T98">Stack </text:span><text:span text:style-name="T106">就能計算</text:span><text:span text:style-name="T46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8">Postfix Stack </text:span><text:span text:style-name="T20">計算規則</text:span></text:p>
            <text:p text:style-name="P5" loext:marker-style-name="T47"><text:span text:style-name="T64">① </text:span><text:span text:style-name="T48">從左往右讀取每個符號</text:span></text:p>
            <text:p text:style-name="P36" loext:marker-style-name="T47"><text:span text:style-name="T64">② </text:span><text:span text:style-name="T49">看到 運算元（數字</text:span><text:span text:style-name="T65">/</text:span><text:span text:style-name="T49">變數）</text:span><text:span text:style-name="T46">→ </text:span><text:span text:style-name="T107">直接 </text:span><text:span text:style-name="T99">Push </text:span><text:span text:style-name="T107">進 </text:span><text:span text:style-name="T99">Stack</text:span></text:p>
            <text:p text:style-name="P37" loext:marker-style-name="T47"><text:span text:style-name="T64">③ </text:span><text:span text:style-name="T50">看到 運算子（</text:span><text:span text:style-name="T66">+</text:span><text:span text:style-name="T50">、</text:span><text:span text:style-name="T66">-</text:span><text:span text:style-name="T50">、</text:span><text:span text:style-name="T66">×</text:span><text:span text:style-name="T50">、</text:span><text:span text:style-name="T66">÷</text:span><text:span text:style-name="T50">）</text:span><text:span text:style-name="T46">→ </text:span><text:span text:style-name="T88">Pop </text:span><text:span text:style-name="T83">兩個值計算，結果 </text:span><text:span text:style-name="T88">Push </text:span><text:span text:style-name="T83">回 </text:span><text:span text:style-name="T88">Stack</text:span></text:p>
            <text:p text:style-name="P31" loext:marker-style-name="T172"><text:span text:style-name="T174">⚠️ </text:span><text:span text:style-name="T156">重要：</text:span><text:span text:style-name="T158">Pop </text:span><text:span text:style-name="T156">順序是「先 </text:span><text:span text:style-name="T158">Pop </text:span><text:span text:style-name="T156">的是右運算元，後 </text:span><text:span text:style-name="T158">Pop </text:span><text:span text:style-name="T156">的是左運算元」</text:span></text:p>
            <text:p text:style-name="P38" loext:marker-style-name="T55"><text:span text:style-name="T54">例：</text:span><text:span text:style-name="T189">Stack </text:span><text:span text:style-name="T190">由上到下為 </text:span><text:span text:style-name="T189">[5, 2]</text:span><text:span text:style-name="T54">，遇到 </text:span><text:span text:style-name="T74">-</text:span><text:span text:style-name="T54">，計算 </text:span><text:span text:style-name="T74">2 - 5 = -3</text:span><text:span text:style-name="T54">（</text:span><text:span text:style-name="T164">先</text:span><text:span text:style-name="T166">Pop</text:span><text:span text:style-name="T164">的</text:span><text:span text:style-name="T166">5</text:span><text:span text:style-name="T164">是右</text:span><text:span text:style-name="T54">，</text:span><text:span text:style-name="T191">後</text:span><text:span text:style-name="T192">Pop</text:span><text:span text:style-name="T191">的</text:span><text:span text:style-name="T192">2</text:span><text:span text:style-name="T191">是左</text:span><text:span text:style-name="T54">）</text:span></text:p>
          </table:table-cell>
        </table:table-row>
      </table:table>
      <text:p text:style-name="P6"/>
      <text:h text:style-name="P12" text:outline-level="2" loext:marker-style-name="T30"><text:span text:style-name="T30">113</text:span><text:span text:style-name="T29">題實戰：</text:span><text:span text:style-name="T30">36 12 ÷ 10 23 - × 50 40 - +</text:span></text:h>
      <text:p text:style-name="P25" loext:marker-style-name="T34"><text:span text:style-name="T33">答案 </text:span><text:span text:style-name="T44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①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6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36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36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②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2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12 </text:span><text:span text:style-name="T164">先</text:span><text:span text:style-name="T166">Pop</text:span><text:span text:style-name="T164">的是右</text:span><text:span text:style-name="T61"> </text:span></text:p>
          </table:table-cell>
          <table:table-cell table:style-name="表格12.A3" office:value-type="string">
            <text:p text:style-name="Standard" loext:marker-style-name="T60"><text:span text:style-name="T77">[36, 12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③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÷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67">Pop 12</text:span><text:span text:style-name="T77">, Pop 36</text:span><text:span text:style-name="T61">，</text:span><text:span text:style-name="T195">計算 </text:span><text:span text:style-name="T196">36÷</text:span><text:span text:style-name="T167">12</text:span><text:span text:style-name="T196">=3</text:span><text:span text:style-name="T195">，</text:span><text:span text:style-name="T196">Push 3</text:span></text:p>
          </table:table-cell>
          <table:table-cell table:style-name="表格12.A2" office:value-type="string">
            <text:p text:style-name="Standard" loext:marker-style-name="T60"><text:span text:style-name="T77">[3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6÷12=3</text:span><text:span text:style-name="T60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④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1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[3, 10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⑤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23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23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3, 10, 23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⑥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2.A3" office:value-type="string">
            <text:p text:style-name="Standard" loext:marker-style-name="T60"><text:span text:style-name="T167">Pop 23</text:span><text:span text:style-name="T77">, Pop 10</text:span><text:span text:style-name="T61">，計算 </text:span><text:span text:style-name="T77">10-</text:span><text:span text:style-name="T167">23</text:span><text:span text:style-name="T77">=-13</text:span><text:span text:style-name="T61">，</text:span><text:span text:style-name="T77">Push -13</text:span></text:p>
          </table:table-cell>
          <table:table-cell table:style-name="表格12.A3" office:value-type="string">
            <text:p text:style-name="Standard" loext:marker-style-name="T60"><text:span text:style-name="T77">[3, -13]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0-23=-13</text:span><text:span text:style-name="T60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⑦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×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67">Pop -13</text:span><text:span text:style-name="T77">, Pop 3</text:span><text:span text:style-name="T61">，計算 </text:span><text:span text:style-name="T77">3×</text:span><text:span text:style-name="T167">(-13)</text:span><text:span text:style-name="T77">=-39</text:span><text:span text:style-name="T61">，</text:span><text:span text:style-name="T77">Push -39</text:span></text:p>
          </table:table-cell>
          <table:table-cell table:style-name="表格12.A2" office:value-type="string">
            <text:p text:style-name="Standard" loext:marker-style-name="T60"><text:span text:style-name="T77">[-39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×(-13)=-39</text:span><text:span text:style-name="T60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⑧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5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5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[-39, 50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⑨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40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40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-39, 50, 40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⑩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2.A3" office:value-type="string">
            <text:p text:style-name="Standard" loext:marker-style-name="T60"><text:span text:style-name="T167">Pop 40</text:span><text:span text:style-name="T77">, Pop 50</text:span><text:span text:style-name="T61">，計算 </text:span><text:span text:style-name="T77">50-</text:span><text:span text:style-name="T167">40</text:span><text:span text:style-name="T77">=10</text:span><text:span text:style-name="T61">，</text:span><text:span text:style-name="T77">Push 10</text:span></text:p>
          </table:table-cell>
          <table:table-cell table:style-name="表格12.A3" office:value-type="string">
            <text:p text:style-name="Standard" loext:marker-style-name="T60"><text:span text:style-name="T77">[-39, 10]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50-40=10</text:span><text:span text:style-name="T60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⑪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67">Pop 10</text:span><text:span text:style-name="T77">, Pop -39</text:span><text:span text:style-name="T61">，計算 </text:span><text:span text:style-name="T77">-39+</text:span><text:span text:style-name="T167">10</text:span><text:span text:style-name="T77">=-29</text:span><text:span text:style-name="T61">，</text:span><text:span text:style-name="T77">Push -29</text:span></text:p>
          </table:table-cell>
          <table:table-cell table:style-name="表格12.A2" office:value-type="string">
            <text:p text:style-name="Standard" loext:marker-style-name="T60"><text:span text:style-name="T77">[-29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-39+10=-29</text:span><text:span text:style-name="T60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42"><text:span text:style-name="T141">結果</text:span><text:span text:style-name="T142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42"><text:span text:style-name="T147">Stack </text:span><text:span text:style-name="T141">剩下 </text:span><text:span text:style-name="T147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42"><text:span text:style-name="T147">★ </text:span><text:span text:style-name="T141">答案 </text:span><text:span text:style-name="T147">= -29</text:span></text:p>
          </table:table-cell>
        </table:table-row>
      </table:table>
      <text:p text:style-name="P6"/>
      <text:h text:style-name="P12" text:outline-level="2" loext:marker-style-name="T30"><text:span text:style-name="T30">114</text:span><text:span text:style-name="T29">題實戰：</text:span><text:span text:style-name="T30">2 5 × 4 2 + - 6 +</text:span></text:h>
      <text:p text:style-name="P25" loext:marker-style-name="T34"><text:span text:style-name="T33">答案 </text:span><text:span text:style-name="T44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①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[2]</text:span><text:span text:style-name="T60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②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5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5 <text:s/></text:span><text:span text:style-name="T85">先</text:span><text:span text:style-name="T90">Pop</text:span><text:span text:style-name="T85">的是右</text:span></text:p>
          </table:table-cell>
          <table:table-cell table:style-name="表格13.A3" office:value-type="string">
            <text:p text:style-name="Standard" loext:marker-style-name="T60"><text:span text:style-name="T77">[2, 5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60"><text:span text:style-name="T77">③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×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3">Pop 5</text:span><text:span text:style-name="T77">, Pop 2</text:span><text:span text:style-name="T61">，計算 </text:span><text:span text:style-name="T77">2×</text:span><text:span text:style-name="T93">5</text:span><text:span text:style-name="T77">=10</text:span><text:span text:style-name="T61">，</text:span><text:span text:style-name="T77">Push 10</text:span></text:p>
          </table:table-cell>
          <table:table-cell table:style-name="表格13.A2" office:value-type="string">
            <text:p text:style-name="Standard" loext:marker-style-name="T60"><text:span text:style-name="T77">[10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×5=10</text:span><text:span text:style-name="T60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④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4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4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[10, 4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⑤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[10, 4, 2]</text:span><text:span text:style-name="T60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⑥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3.A3" office:value-type="string">
            <text:p text:style-name="Standard" loext:marker-style-name="T60"><text:span text:style-name="T93">Pop 2</text:span><text:span text:style-name="T77">, Pop 4</text:span><text:span text:style-name="T61">，計算 </text:span><text:span text:style-name="T77">4+</text:span><text:span text:style-name="T93">2</text:span><text:span text:style-name="T77">=6</text:span><text:span text:style-name="T61">，</text:span><text:span text:style-name="T77">Push 6</text:span></text:p>
          </table:table-cell>
          <table:table-cell table:style-name="表格13.A3" office:value-type="string">
            <text:p text:style-name="Standard" loext:marker-style-name="T60"><text:span text:style-name="T77">[10, 6]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4+2=6</text:span><text:span text:style-name="T60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⑦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3">Pop 6</text:span><text:span text:style-name="T77">, Pop 10</text:span><text:span text:style-name="T61">，計算 </text:span><text:span text:style-name="T77">10-</text:span><text:span text:style-name="T93">6</text:span><text:span text:style-name="T77">=4</text:span><text:span text:style-name="T61">，</text:span><text:span text:style-name="T77">Push 4</text:span></text:p>
          </table:table-cell>
          <table:table-cell table:style-name="表格13.A2" office:value-type="string">
            <text:p text:style-name="Standard" loext:marker-style-name="T60"><text:span text:style-name="T77">[4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10-6=4</text:span><text:span text:style-name="T60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⑧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6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6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[4, 6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⑨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3">Pop</text:span><text:span text:style-name="T77"> 6, Pop 4</text:span><text:span text:style-name="T61">，計算 </text:span><text:span text:style-name="T77">4+</text:span><text:span text:style-name="T93">6</text:span><text:span text:style-name="T77">=10</text:span><text:span text:style-name="T61">，</text:span><text:span text:style-name="T77">Push 10</text:span></text:p>
          </table:table-cell>
          <table:table-cell table:style-name="表格13.A2" office:value-type="string">
            <text:p text:style-name="Standard" loext:marker-style-name="T60"><text:span text:style-name="T77">[10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4+6=10</text:span><text:span text:style-name="T60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42"><text:span text:style-name="T141">結果</text:span><text:span text:style-name="T142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42"><text:span text:style-name="T147">Stack </text:span><text:span text:style-name="T141">剩下 </text:span><text:span text:style-name="T147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42"><text:span text:style-name="T147">★ </text:span><text:span text:style-name="T141">答案 </text:span><text:span text:style-name="T147">= 10</text:span></text:p>
          </table:table-cell>
        </table:table-row>
      </table:table>
      <text:p text:style-name="Standard"/>
      <text:h text:style-name="P14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12" text:outline-level="2" loext:marker-style-name="T30"><text:span text:style-name="T29">建樹（一步一步拆解）</text:span><text:span text:style-name="T30"/></text:h>
      <text:p text:style-name="P4"><text:span text:style-name="T33">步驟 </text:span><text:span text:style-name="T44">1</text:span><text:span text:style-name="T33">：</text:span><text:span text:style-name="T48">最外層最後算</text:span><text:span text:style-name="T46">：</text:span><text:span text:style-name="T65">× <text:s/>→ <text:s/></text:span><text:span text:style-name="T49">根節點 </text:span><text:span text:style-name="T65">= ×</text:span></text:p>
      <text:p text:style-name="P4"><text:span text:style-name="T33">步驟 </text:span><text:span text:style-name="T44">2</text:span><text:span text:style-name="T33">：</text:span><text:span text:style-name="T46">左子樹：</text:span><text:span text:style-name="T64">((6×(5-3))-(1+2))</text:span><text:span text:style-name="T46">，</text:span><text:span text:style-name="T48">最後算 </text:span><text:span text:style-name="T67">-</text:span></text:p>
      <text:p text:style-name="P4"><text:span text:style-name="T33">步驟 </text:span><text:span text:style-name="T44">3</text:span><text:span text:style-name="T33">：</text:span><text:span text:style-name="T46">左子樹左邊：</text:span><text:span text:style-name="T64">6×(5-3)</text:span><text:span text:style-name="T46">，</text:span><text:span text:style-name="T48">最後算 </text:span><text:span text:style-name="T67">×</text:span></text:p>
      <text:p text:style-name="P4"><text:span text:style-name="T33">步驟 </text:span><text:span text:style-name="T44">4</text:span><text:span text:style-name="T33">：</text:span><text:span text:style-name="T46">再拆：</text:span><text:span text:style-name="T64">5-3 </text:span><text:span text:style-name="T48">最後算 </text:span><text:span text:style-name="T67">-</text:span><text:span text:style-name="T46">，葉節點 </text:span><text:span text:style-name="T64">5 </text:span><text:span text:style-name="T46">和 </text:span><text:span text:style-name="T64">3</text:span></text:p>
      <text:p text:style-name="P4"><text:span text:style-name="T33">步驟 </text:span><text:span text:style-name="T44">5</text:span><text:span text:style-name="T33">：</text:span><text:span text:style-name="T46">左子樹右邊：</text:span><text:span text:style-name="T64">1+2</text:span><text:span text:style-name="T46">，葉節點 </text:span><text:span text:style-name="T64">1 </text:span><text:span text:style-name="T46">和 </text:span><text:span text:style-name="T64">2</text:span></text:p>
      <text:p text:style-name="P4"><text:span text:style-name="T33">步驟 </text:span><text:span text:style-name="T44">6</text:span><text:span text:style-name="T33">：</text:span><text:span text:style-name="T46">右子樹：</text:span><text:span text:style-name="T64">((4+2)÷3)+(5×4)</text:span><text:span text:style-name="T46">，</text:span><text:span text:style-name="T48">最後算 </text:span><text:span text:style-name="T67">+</text:span></text:p>
      <text:p text:style-name="P4"><text:span text:style-name="T33">步驟 </text:span><text:span text:style-name="T44">7</text:span><text:span text:style-name="T33">：</text:span><text:span text:style-name="T46">右子樹左邊：</text:span><text:span text:style-name="T64">(4+2)÷3</text:span><text:span text:style-name="T46">，</text:span><text:span text:style-name="T48">最後算 </text:span><text:span text:style-name="T67">÷</text:span></text:p>
      <text:p text:style-name="P4"><text:span text:style-name="T33">步驟 </text:span><text:span text:style-name="T44">8</text:span><text:span text:style-name="T33">：</text:span><text:span text:style-name="T46">再拆：</text:span><text:span text:style-name="T64">4+2</text:span><text:span text:style-name="T46">，葉節點 </text:span><text:span text:style-name="T64">4 </text:span><text:span text:style-name="T46">和 </text:span><text:span text:style-name="T64">2</text:span></text:p>
      <text:p text:style-name="P4"><text:span text:style-name="T33">步驟 </text:span><text:span text:style-name="T44">9</text:span><text:span text:style-name="T33">：</text:span><text:span text:style-name="T46">右子樹右邊：</text:span><text:span text:style-name="T64">5×4</text:span><text:span text:style-name="T46">，葉節點 </text:span><text:span text:style-name="T64">5 </text:span><text:span text:style-name="T46">和 </text:span><text:span text:style-name="T64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2" loext:marker-style-name="T34"><text:span text:style-name="T33">完整表達式樹</text:span><text:span text:style-name="T34"/></text:p>
            <text:p text:style-name="P39" loext:marker-style-name="T27"><text:span text:style-name="T27"><text:s text:c="19"/>* <text:s text:c="30"/>&lt;- 根節點</text:span><text:span text:style-name="T27"/></text:p>
            <text:p text:style-name="P34" loext:marker-style-name="T27"><text:span text:style-name="T27"><text:s text:c="17"/>/ <text:s text:c="2"/>\</text:span><text:span text:style-name="T27"/></text:p>
            <text:p text:style-name="P34" loext:marker-style-name="T27"><text:span text:style-name="T27"><text:s text:c="10"/>- <text:s text:c="16"/>+</text:span><text:span text:style-name="T27"/></text:p>
            <text:p text:style-name="P34" loext:marker-style-name="T27"><text:span text:style-name="T27"><text:s text:c="8"/>/ <text:s text:c="2"/>\ <text:s text:c="12"/>/ <text:s text:c="2"/>\</text:span><text:span text:style-name="T27"/></text:p>
            <text:p text:style-name="P34" loext:marker-style-name="T27"><text:span text:style-name="T27"><text:s text:c="5"/>* <text:s text:c="8"/>+ <text:s text:c="6"/>/ <text:s text:c="8"/>*</text:span><text:span text:style-name="T27"/></text:p>
            <text:p text:style-name="P34" loext:marker-style-name="T27"><text:span text:style-name="T27"><text:s text:c="3"/>/ <text:s text:c="2"/>\ <text:s text:c="4"/>/ <text:s text:c="2"/>\ <text:s text:c="2"/>/ <text:s text:c="2"/>\ <text:s text:c="4"/>/ <text:s text:c="2"/>\</text:span><text:span text:style-name="T27"/></text:p>
            <text:p text:style-name="P35" loext:marker-style-name="T27"><text:span text:style-name="T27"><text:s text:c="2"/>6 <text:s text:c="4"/>- <text:s text:c="2"/>1 <text:s text:c="4"/>2 + <text:s text:c="4"/>3 <text:s text:c="2"/>5 <text:s text:c="4"/>4</text:span><text:span text:style-name="T27"/></text:p>
            <text:p text:style-name="P35" loext:marker-style-name="T27"><text:span text:style-name="T27"><text:s text:c="6"/>/ <text:s text:c="2"/>\ <text:s text:c="6"/>/ <text:s text:c="2"/>\</text:span><text:span text:style-name="T27"/></text:p>
            <text:p text:style-name="P35" loext:marker-style-name="T27"><text:span text:style-name="T27"><text:s text:c="5"/>5 <text:s text:c="4"/>3 <text:s text:c="4"/>4 <text:s text:c="4"/>2</text:span><text:span text:style-name="T27"/></text:p>
          </table:table-cell>
        </table:table-row>
      </table:table>
      <text:p text:style-name="P10"/>
      <text:h text:style-name="P12" text:outline-level="2" loext:marker-style-name="T30"><text:span text:style-name="T30">Postorder </text:span><text:span text:style-name="T29">求值（</text:span><text:span text:style-name="T30">Bottom-Up</text:span><text:span text:style-name="T29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①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5-3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2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②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6×2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= 12</text:span><text:span text:style-name="T53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③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1+2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3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④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12-3</text:span><text:span text:style-name="T52">（左子樹完成）</text:span></text:p>
          </table:table-cell>
          <table:table-cell table:style-name="表格16.A3" office:value-type="string">
            <text:p text:style-name="Standard" loext:marker-style-name="T56"><text:span text:style-name="T75">= 9</text:span><text:span text:style-name="T56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⑤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4+2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6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⑥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6÷3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= 2</text:span><text:span text:style-name="T53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⑦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5×4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20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⑧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2+20</text:span><text:span text:style-name="T52">（右子樹完成）</text:span></text:p>
          </table:table-cell>
          <table:table-cell table:style-name="表格16.A3" office:value-type="string">
            <text:p text:style-name="Standard" loext:marker-style-name="T56"><text:span text:style-name="T75">= 22</text:span><text:span text:style-name="T56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22"><text:span text:style-name="T127">⑨</text:span><text:span text:style-name="T122"/></text:p>
          </table:table-cell>
          <table:table-cell table:style-name="表格16.A10" office:value-type="string">
            <text:p text:style-name="Standard" loext:marker-style-name="T122"><text:span text:style-name="T127">9×22</text:span><text:span text:style-name="T123">（根節點）</text:span></text:p>
          </table:table-cell>
          <table:table-cell table:style-name="表格16.A10" office:value-type="string">
            <text:p text:style-name="Standard" loext:marker-style-name="T122"><text:span text:style-name="T127">= 198 ★</text:span><text:span text:style-name="T122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8">Postorder</text:span><text:span text:style-name="T20">？這個範例完美說明了一條鏈：</text:span></text:p>
            <text:p text:style-name="P23" loext:marker-style-name="T34"><text:span text:style-name="T44">Expression Tree <text:s/>→ <text:s/>Postorder </text:span><text:span text:style-name="T33">走訪 <text:s/>→ <text:s/></text:span><text:span text:style-name="T44">Postfix </text:span><text:span text:style-name="T33">算式 <text:s/>→ <text:s/></text:span><text:span text:style-name="T44">Stack </text:span><text:span text:style-name="T33">求值 <text:s/>→ <text:s/>答案 </text:span><text:span text:style-name="T44">198</text:span></text:p>
          </table:table-cell>
        </table:table-row>
      </table:table>
      <text:p text:style-name="Standard"/>
      <text:h text:style-name="P14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25" loext:marker-style-name="T47"><text:span text:style-name="T46">這是資訊類考試最常考的題型之一，必須熟練。</text:span><text:span text:style-name="T47"/></text:p>
      <text:p text:style-name="P8"/>
      <text:h text:style-name="P12" text:outline-level="2" loext:marker-style-name="T30"><text:span text:style-name="T29">優先權表（考前必背）</text:span><text:span text:style-name="T30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56"><text:span text:style-name="T75">× <text:s/>÷</text:span><text:span text:style-name="T57">（乘、除）</text:span></text:p>
          </table:table-cell>
          <table:table-cell table:style-name="表格18.A2" office:value-type="string">
            <text:p text:style-name="Standard" loext:marker-style-name="T105"><text:span text:style-name="T104">優先權 </text:span><text:span text:style-name="T101">2</text:span><text:span text:style-name="T104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59"><text:span text:style-name="T76">+ -</text:span><text:span text:style-name="T58">（加、減）</text:span></text:p>
          </table:table-cell>
          <table:table-cell table:style-name="表格18.A3" office:value-type="string">
            <text:p text:style-name="Standard" loext:marker-style-name="T165"><text:span text:style-name="T164">優先權 </text:span><text:span text:style-name="T166">1</text:span><text:span text:style-name="T164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86"><text:span text:style-name="T85">（ <text:s/>）（括號）</text:span><text:span text:style-name="T86"/></text:p>
          </table:table-cell>
          <table:table-cell table:style-name="表格18.A2" office:value-type="string">
            <text:p text:style-name="Standard" loext:marker-style-name="T86"><text:span text:style-name="T85">特殊處理（見規則）</text:span><text:span text:style-name="T86"/></text:p>
          </table:table-cell>
        </table:table-row>
      </table:table>
      <text:p text:style-name="P10"/>
      <text:h text:style-name="P12" text:outline-level="2" loext:marker-style-name="T30"><text:span text:style-name="T29">演算法步驟（</text:span><text:span text:style-name="T30">5</text:span><text:span text:style-name="T29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47"><text:span text:style-name="T46">規則 </text:span><text:span text:style-name="T64">1</text:span><text:span text:style-name="T46">：</text:span><text:span text:style-name="T48">遇到 運算元（</text:span><text:span text:style-name="T67">A</text:span><text:span text:style-name="T48">、</text:span><text:span text:style-name="T67">B</text:span><text:span text:style-name="T48">、</text:span><text:span text:style-name="T67">1</text:span><text:span text:style-name="T48">、</text:span><text:span text:style-name="T67">2 </text:span><text:span text:style-name="T48">等）</text:span><text:span text:style-name="T46">→ </text:span><text:span text:style-name="T178">直接輸出到結果</text:span></text:p>
            <text:p text:style-name="P38" loext:marker-style-name="T47"><text:span text:style-name="T46">規則 </text:span><text:span text:style-name="T64">2</text:span><text:span text:style-name="T46">：</text:span><text:span text:style-name="T84">遇到 左括號 </text:span><text:span text:style-name="T89">(</text:span><text:span text:style-name="T64"> → </text:span><text:span text:style-name="T46">直接 </text:span><text:span text:style-name="T64">Push </text:span><text:span text:style-name="T46">進 </text:span><text:span text:style-name="T64">Stack</text:span></text:p>
            <text:p text:style-name="P38" loext:marker-style-name="T47"><text:span text:style-name="T46">規則 </text:span><text:span text:style-name="T64">3</text:span><text:span text:style-name="T46">：</text:span><text:span text:style-name="T197">遇到 右括號 </text:span><text:span text:style-name="T199">)</text:span><text:span text:style-name="T64"> → </text:span><text:span text:style-name="T106">持續 </text:span><text:span text:style-name="T98">Pop </text:span><text:span text:style-name="T106">並輸出</text:span><text:span text:style-name="T46">，</text:span><text:span text:style-name="T201">直到遇見左括號 </text:span><text:span text:style-name="T202">( </text:span><text:span text:style-name="T201">為止</text:span><text:span text:style-name="T46">（</text:span><text:span text:style-name="T149">括號本身不輸出</text:span><text:span text:style-name="T46">）</text:span></text:p>
            <text:p text:style-name="P38" loext:marker-style-name="T47"><text:span text:style-name="T46">規則 </text:span><text:span text:style-name="T64">4</text:span><text:span text:style-name="T46">：</text:span><text:span text:style-name="T49">遇到 運算子（</text:span><text:span text:style-name="T65">+</text:span><text:span text:style-name="T49">、</text:span><text:span text:style-name="T65">-</text:span><text:span text:style-name="T49">、</text:span><text:span text:style-name="T65">×</text:span><text:span text:style-name="T49">、</text:span><text:span text:style-name="T65">÷</text:span><text:span text:style-name="T49">）</text:span><text:span text:style-name="T46">→ </text:span><text:span text:style-name="T83">若 </text:span><text:span text:style-name="T88">Stack </text:span><text:span text:style-name="T83">頂端運算子優先權 ≥ 目前運算子</text:span><text:span text:style-name="T46">，</text:span><text:span text:style-name="T106">先 </text:span><text:span text:style-name="T98">Pop </text:span><text:span text:style-name="T106">再 </text:span><text:span text:style-name="T98">Push</text:span><text:span text:style-name="T106">；否則直接 </text:span><text:span text:style-name="T98">Push</text:span><text:span text:style-name="T200">(</text:span><text:span text:style-name="T198">當看到新的運算子時：如果 </text:span><text:span text:style-name="T200">Stack </text:span><text:span text:style-name="T198">裡面的運算子比它更早算就：先拿</text:span><text:span text:style-name="T200">Stack </text:span><text:span text:style-name="T198">裡面的運算子來輸出</text:span><text:span text:style-name="T200">)</text:span></text:p>
            <text:p text:style-name="P37" loext:marker-style-name="T47"><text:span text:style-name="T46">規則 </text:span><text:span text:style-name="T64">5</text:span><text:span text:style-name="T46">：</text:span><text:span text:style-name="T48">讀取結束 </text:span><text:span text:style-name="T46">→ </text:span><text:span text:style-name="T178">把 </text:span><text:span text:style-name="T179">Stack </text:span><text:span text:style-name="T178">剩餘的所有運算子全部 </text:span><text:span text:style-name="T179">Pop </text:span><text:span text:style-name="T178">並輸出</text:span></text:p>
          </table:table-cell>
        </table:table-row>
      </table:table>
      <text:p text:style-name="P10"/>
      <text:h text:style-name="P12" text:outline-level="2" loext:marker-style-name="T30"><text:span text:style-name="T30">5 </text:span><text:span text:style-name="T29">道練習題完整解析</text:span></text:h>
      <text:p text:style-name="P32" loext:marker-style-name="T125"><text:span text:style-name="T124">題目 </text:span><text:span text:style-name="T128">1</text:span><text:span text:style-name="T124">：</text:span><text:span text:style-name="T129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1">+ *</text:span><text:span text:style-name="T70"> <text:s text:c="4"/>(</text:span><text:span text:style-name="T92">* &gt; +，直接放入</text:span><text:span text:style-name="T70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+ *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BC</text:span><text:span text:style-name="T108">*+</text:span></text:p>
          </table:table-cell>
          <table:table-cell table:style-name="表格20.A3" office:value-type="string">
            <text:p text:style-name="Standard" loext:marker-style-name="T70"><text:span text:style-name="T70">（全部 </text:span><text:span text:style-name="T203">Pop：先 *，再 +</text:span><text:span text:style-name="T70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45"><text:span text:style-name="T145">★ 答案：</text:span><text:span text:style-name="T160">ABC*+</text:span></text:p>
          </table:table-cell>
          <table:covered-table-cell/>
          <table:covered-table-cell/>
        </table:table-row>
      </table:table>
      <text:p text:style-name="P8"/>
      <text:p text:style-name="P32" loext:marker-style-name="T125"><text:span text:style-name="T124">題目 </text:span><text:span text:style-name="T128">2</text:span><text:span text:style-name="T124">：</text:span><text:span text:style-name="T129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（空）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(</text:span><text:span text:style-name="T70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2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B</text:span><text:span text:style-name="T72">+</text:span></text:p>
          </table:table-cell>
          <table:table-cell table:style-name="表格21.A2" office:value-type="string">
            <text:p text:style-name="Standard" loext:marker-style-name="T92"><text:span text:style-name="T92">（空） <text:s/>← Pop 到 ( 為止</text:span><text:span text:style-name="T92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</text:span><text:span text:style-name="T72">+</text:span></text:p>
          </table:table-cell>
          <table:table-cell table:style-name="表格21.A3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+C*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（Pop *）</text:span><text:span text:style-name="T70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45"><text:span text:style-name="T145">★ 答案：AB+C*</text:span><text:span text:style-name="T145"/></text:p>
          </table:table-cell>
          <table:covered-table-cell/>
          <table:covered-table-cell/>
        </table:table-row>
      </table:table>
      <text:p text:style-name="P8"/>
      <text:p text:style-name="P32" loext:marker-style-name="T125"><text:span text:style-name="T124">題目 </text:span><text:span text:style-name="T128">3</text:span><text:span text:style-name="T124">：</text:span><text:span text:style-name="T129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1">+ * </text:span><text:span text:style-name="T70"><text:s/>（</text:span><text:span text:style-name="T92">* &gt; +，直接放</text:span><text:span text:style-name="T70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2.A2" office:value-type="string">
            <text:p text:style-name="Standard" loext:marker-style-name="T71"><text:span text:style-name="T71">+ *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C*+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- <text:s/>（</text:span><text:span text:style-name="T185">- ≤ *，先 Pop *</text:span><text:span text:style-name="T70">；</text:span><text:span text:style-name="T109">- ≤ +，再 Pop +</text:span><text:span text:style-name="T70">；</text:span><text:span text:style-name="T204">最後 Push -</text:span><text:span text:style-name="T70">）(</text:span><text:span text:style-name="T108">當看到新的運算子時：如果 Stack 裡面的運算子比它更早算就：先拿出來輸出</text:span><text:span text:style-name="T70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C*+D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-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C*+D-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（Pop -）</text:span><text:span text:style-name="T70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45"><text:span text:style-name="T145">★ 答案：ABC*+D-</text:span><text:span text:style-name="T145"/></text:p>
          </table:table-cell>
          <table:covered-table-cell/>
          <table:covered-table-cell/>
        </table:table-row>
      </table:table>
      <text:p text:style-name="P8"/>
      <text:p text:style-name="P32" loext:marker-style-name="T125"><text:span text:style-name="T124">題目 </text:span><text:span text:style-name="T128">4</text:span><text:span text:style-name="T124">：</text:span><text:span text:style-name="T129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（空）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* (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 (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* ( - <text:s/></text:span><text:span text:style-name="T133">注意此處：Stack 頂端根本不是 *</text:span><text:span text:style-name="T205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D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 ( -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CD-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2">* </text:span><text:span text:style-name="T70"><text:s text:c="2"/>← </text:span><text:span text:style-name="T206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D-*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（Pop *）</text:span><text:span text:style-name="T70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45"><text:span text:style-name="T145">★ 答案：AB+CD-*</text:span><text:span text:style-name="T145"/></text:p>
          </table:table-cell>
          <table:covered-table-cell/>
          <table:covered-table-cell/>
        </table:table-row>
      </table:table>
      <text:p text:style-name="P8"/>
      <text:p text:style-name="P32" loext:marker-style-name="T125"><text:span text:style-name="T124">題目 </text:span><text:span text:style-name="T128">5</text:span><text:span text:style-name="T124">：</text:span><text:span text:style-name="T129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<text:s/>（</text:span><text:span text:style-name="T92">* &gt; +，直接放</text:span><text:span text:style-name="T70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(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(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( -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( -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D-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<text:s text:c="2"/>←</text:span><text:span text:style-name="T206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/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-*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讀到 / </text:span><text:span text:style-name="T71">此時 Stack頂端是 *</text:span><text:span text:style-name="T70"><text:line-break/><text:line-break/></text:span><text:span text:style-name="T161">/ 與 * 同優先權 → 先 Pop *</text:span><text:span text:style-name="T70"><text:line-break/><text:line-break/></text:span><text:span text:style-name="T110">此時新的 Stack頂端變成 +</text:span><text:span text:style-name="T70"><text:line-break/><text:line-break/></text:span><text:span text:style-name="T108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E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D-*E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/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-*E/+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（Pop /，再 Pop +）</text:span><text:span text:style-name="T70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45"><text:span text:style-name="T145">★ 答案：ABCD-*E/+</text:span><text:span text:style-name="T145"/></text:p>
          </table:table-cell>
          <table:covered-table-cell/>
          <table:covered-table-cell/>
        </table:table-row>
      </table:table>
      <text:p text:style-name="P10"/>
      <text:h text:style-name="P12" text:outline-level="2" loext:marker-style-name="T30"><text:span text:style-name="T29">常見陷阱：</text:span><text:span text:style-name="T32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39" loext:marker-style-name="T175"><text:span text:style-name="T175">❌ 錯誤答案：ABC+-</text:span><text:span text:style-name="T175"/></text:p>
            <text:p text:style-name="P38" loext:marker-style-name="T144"><text:span text:style-name="T144">✅ </text:span><text:span text:style-name="T146">正確答案：AB-C+</text:span></text:p>
            <text:p text:style-name="P9" loext:marker-style-name="T47"><text:span text:style-name="T46">原因：</text:span><text:span text:style-name="T64">+ </text:span><text:span text:style-name="T46">和 </text:span><text:span text:style-name="T64">- </text:span><text:span text:style-name="T46">優先權相同，採左結合，計算順序為 </text:span><text:span text:style-name="T64">(A-B)+C</text:span><text:span text:style-name="T46">。 </text:span><text:span text:style-name="T83">遇到 </text:span><text:span text:style-name="T88">+ </text:span><text:span text:style-name="T83">時，</text:span><text:span text:style-name="T88">Stack </text:span><text:span text:style-name="T83">頂端是 </text:span><text:span text:style-name="T88">-</text:span><text:span text:style-name="T83">，兩者優先權相同</text:span><text:span text:style-name="T46">，</text:span><text:span text:style-name="T201">必須先 </text:span><text:span text:style-name="T202">Pop -</text:span><text:span text:style-name="T201">，再 </text:span><text:span text:style-name="T202">Push +</text:span><text:span text:style-name="T46">。</text:span></text:p>
          </table:table-cell>
        </table:table-row>
      </table:table>
      <text:p text:style-name="Standard"/>
      <text:h text:style-name="P14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12" text:outline-level="2" loext:marker-style-name="T30"><text:span text:style-name="T30">Prefix Stack </text:span><text:span text:style-name="T29">求值</text:span></text:h>
      <text:p text:style-name="P25" loext:marker-style-name="T47"><text:span text:style-name="T159">Prefix</text:span><text:span text:style-name="T157">（前置式）與 </text:span><text:span text:style-name="T159">Postfix </text:span><text:span text:style-name="T157">的差別在於讀取方向</text:span><text:span text:style-name="T46">：</text:span><text:span text:style-name="T134">Postfix </text:span><text:span text:style-name="T132">從左往右，</text:span><text:span text:style-name="T134">Prefix </text:span><text:span text:style-name="T132">從右往左</text:span><text:span text:style-name="T46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8">Prefix Stack </text:span><text:span text:style-name="T20">計算規則</text:span></text:p>
            <text:p text:style-name="P39" loext:marker-style-name="T47"><text:span text:style-name="T64">① </text:span><text:span text:style-name="T106">從右往左讀取每個符號</text:span></text:p>
            <text:p text:style-name="P36" loext:marker-style-name="T47"><text:span text:style-name="T64">② </text:span><text:span text:style-name="T48">看到 運算元 </text:span><text:span text:style-name="T46">→ </text:span><text:span text:style-name="T99">Push </text:span><text:span text:style-name="T107">進 </text:span><text:span text:style-name="T99">Stack</text:span></text:p>
            <text:p text:style-name="P37" loext:marker-style-name="T47"><text:span text:style-name="T64">③ </text:span><text:span text:style-name="T51">看到 運算子</text:span><text:span text:style-name="T46"> → </text:span><text:span text:style-name="T88">Pop </text:span><text:span text:style-name="T83">兩個值，計算（先 </text:span><text:span text:style-name="T88">Pop </text:span><text:span text:style-name="T83">的是左邊，後 </text:span><text:span text:style-name="T88">Pop </text:span><text:span text:style-name="T83">的是右邊）</text:span><text:span text:style-name="T46">，</text:span><text:span text:style-name="T64">Push </text:span><text:span text:style-name="T46">結果</text:span></text:p>
            <text:p text:style-name="P31" loext:marker-style-name="T209"><text:span text:style-name="T207">⚠️ </text:span><text:span text:style-name="T208">注意：</text:span><text:span text:style-name="T207">Prefix </text:span><text:span text:style-name="T208">的 </text:span><text:span text:style-name="T207">Pop </text:span><text:span text:style-name="T208">順序與 </text:span><text:span text:style-name="T207">Postfix </text:span><text:span text:style-name="T208">相反！</text:span></text:p>
          </table:table-cell>
        </table:table-row>
      </table:table>
      <text:p text:style-name="P8"/>
      <text:p text:style-name="P25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4</text:span><text:span text:style-name="T61">（最右）</text:span></text:p>
          </table:table-cell>
          <table:table-cell table:style-name="表格27.A2" office:value-type="string">
            <text:p text:style-name="Standard" loext:marker-style-name="T60"><text:span text:style-name="T77">Push 4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[4]</text:span><text:span text:style-name="T60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0"><text:span text:style-name="T77">3</text:span><text:span text:style-name="T60"/></text:p>
          </table:table-cell>
          <table:table-cell table:style-name="表格27.A3" office:value-type="string">
            <text:p text:style-name="Standard" loext:marker-style-name="T60"><text:span text:style-name="T77">Push 3</text:span><text:span text:style-name="T60"/></text:p>
          </table:table-cell>
          <table:table-cell table:style-name="表格27.A3" office:value-type="string">
            <text:p text:style-name="Standard" loext:marker-style-name="T60"><text:span text:style-name="T77">[4, 3]</text:span><text:span text:style-name="T60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[4, 3, 2]</text:span><text:span text:style-name="T60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0"><text:span text:style-name="T77">*</text:span><text:span text:style-name="T60"/></text:p>
          </table:table-cell>
          <table:table-cell table:style-name="表格27.A3" office:value-type="string">
            <text:p text:style-name="Standard" loext:marker-style-name="T60"><text:span text:style-name="T111">Pop 2</text:span><text:span text:style-name="T77">, Pop 3</text:span><text:span text:style-name="T61">，計算 </text:span><text:span text:style-name="T111">2</text:span><text:span text:style-name="T77">×3=6</text:span><text:span text:style-name="T61">，</text:span><text:span text:style-name="T77">Push 6</text:span></text:p>
          </table:table-cell>
          <table:table-cell table:style-name="表格27.A3" office:value-type="string">
            <text:p text:style-name="Standard" loext:marker-style-name="T60"><text:span text:style-name="T77">[4, 6]</text:span><text:span text:style-name="T60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+ </text:span><text:span text:style-name="T61">（最左）</text:span></text:p>
          </table:table-cell>
          <table:table-cell table:style-name="表格27.A2" office:value-type="string">
            <text:p text:style-name="Standard" loext:marker-style-name="T60"><text:span text:style-name="T111">Pop 6</text:span><text:span text:style-name="T77">, Pop 4</text:span><text:span text:style-name="T61">，計算 </text:span><text:span text:style-name="T111">6</text:span><text:span text:style-name="T77">+4=10</text:span><text:span text:style-name="T61">，</text:span><text:span text:style-name="T77">Push 10</text:span></text:p>
          </table:table-cell>
          <table:table-cell table:style-name="表格27.A2" office:value-type="string">
            <text:p text:style-name="Standard" loext:marker-style-name="T60"><text:span text:style-name="T77">[10]</text:span><text:span text:style-name="T60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42"><text:span text:style-name="T141">結果</text:span><text:span text:style-name="T142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42"><text:span text:style-name="T147">★ </text:span><text:span text:style-name="T141">答案 </text:span><text:span text:style-name="T147">= 10</text:span></text:p>
          </table:table-cell>
        </table:table-row>
      </table:table>
      <text:p text:style-name="P6"/>
      <text:h text:style-name="P12" text:outline-level="2" loext:marker-style-name="T30"><text:span text:style-name="T30">Postfix → Expression Tree</text:span><text:span text:style-name="T30"/></text:h>
      <text:p text:style-name="P40">我們在做什麼？</text:p>
      <text:p text:style-name="P41">Postfix 其實只是一種書寫方式，電腦容易處理。但我們需要知道原始的算式結構。</text:p>
      <text:p text:style-name="P46">例如：<text:span text:style-name="T211">AB+C* 其實代表什麼？</text:span></text:p>
      <text:p text:style-name="P45">答案是：(A+B)*C</text:p>
      <text:p text:style-name="Standard"/>
      <text:p text:style-name="P43">所以這個過程的目的只有一個：<text:span text:style-name="T169">從 AB+C* 恢復出 (A+B)*C</text:span></text:p>
      <text:p text:style-name="Standard"/>
      <text:p text:style-name="P51">⭐ 最重要的觀念</text:p>
      <text:p text:style-name="P61">Stack 裡放的不是字符（A、B、C、+、*），</text:p>
      <text:p text:style-name="P61">而是<text:span text:style-name="T96">逐漸完成的算式</text:span>。</text:p>
      <text:p text:style-name="Standard"/>
      <text:p text:style-name="P41">看這個表格，一切都清楚了：</text:p>
      <text:p text:style-name="Standard"/>
      <text:p text:style-name="P48">讀到 <text:s text:c="3"/>動作 <text:s text:c="25"/>Stack</text:p>
      <text:p text:style-name="P49">A <text:s text:c="5"/>Push A <text:s text:c="23"/>[A]</text:p>
      <text:p text:style-name="P49">B <text:s text:c="5"/>Push B <text:s text:c="23"/>[A][B]</text:p>
      <text:p text:style-name="P52">+ <text:span text:style-name="T216">Pop B、Pop A、組成(A+B)</text:span>、<text:span text:style-name="T217">Push <text:s text:c="2"/>[(A+B)]</text:span></text:p>
      <text:p text:style-name="P49">C <text:s text:c="5"/>Push C <text:s text:c="23"/>[(A+B)][C]</text:p>
      <text:p text:style-name="P52">* <text:span text:style-name="T216">Pop C、Pop(A+B)</text:span>、<text:span text:style-name="T217">組成((A+B)*C)</text:span>、<text:span text:style-name="T182">Push [((A+B)*C)]</text:span></text:p>
      <text:p text:style-name="Standard"/>
      <text:p text:style-name="P57">⚠️ 注意：A、B 不是一直待在 Stack 裡！</text:p>
      <text:p text:style-name="Standard"><text:soft-page-break/></text:p>
      <text:p text:style-name="P41">當看到 + 時：</text:p>
      <text:p text:style-name="P42"><text:s text:c="2"/>✓ Pop B（此時 B 被取出）</text:p>
      <text:p text:style-name="P42"><text:s text:c="2"/>✓ Pop A（此時 A 也被取出，Stack 變空）</text:p>
      <text:p text:style-name="P42"><text:s text:c="2"/>✓ <text:span text:style-name="T95">組成新的「部分算式」：(A+B)</text:span></text:p>
      <text:p text:style-name="P42"><text:s text:c="2"/>✓<text:span text:style-name="T151"> Push (A+B) 回去</text:span>（<text:span text:style-name="T216">現在 Stack 裡只有一個元素：</text:span><text:span text:style-name="T135">(A+B)</text:span>）</text:p>
      <text:p text:style-name="Standard"/>
      <text:p text:style-name="P62">所以 Stack 真正存的是：「已經組好的部分算式」</text:p>
      <text:p text:style-name="Standard"/>
      <text:p text:style-name="P41">(A+B) 其實只是這棵樹的另一種寫法：</text:p>
      <text:p text:style-name="Standard"/>
      <text:p text:style-name="P50"><text:s text:c="2"/>+</text:p>
      <text:p text:style-name="P49"><text:s/>/ \</text:p>
      <text:p text:style-name="P49">A <text:s text:c="2"/>B</text:p>
      <text:p text:style-name="Standard"/>
      <text:p text:style-name="P43">換句話說：Stack 裡存的是「樹」，只是用算式的方式寫出來而已。</text:p>
      <text:p text:style-name="P41">有沒有發現？根本不用提什麼「樹」。</text:p>
      <text:p text:style-name="P43">你只要想成：Stack 裡存的就是「半完成的算式」。</text:p>
      <text:p text:style-name="Standard"/>
      <text:p text:style-name="P40">逐步理解：AB+C*</text:p>
      <text:p text:style-name="Standard"/>
      <text:p text:style-name="P47">讀到 A</text:p>
      <text:p text:style-name="P41">A 就是一個簡單的算式。放進 Stack。</text:p>
      <text:p text:style-name="P49">Stack：[A]</text:p>
      <text:p text:style-name="Standard"/>
      <text:p text:style-name="P47">讀到 B</text:p>
      <text:p text:style-name="P41">B 也是一個簡單的算式。放進 Stack。</text:p>
      <text:p text:style-name="P49">Stack：[A, B]</text:p>
      <text:p text:style-name="Standard"/>
      <text:p text:style-name="P47">讀到 +</text:p>
      <text:p text:style-name="P41">現在遇到一個運算子。運算子需要多少個東西？</text:p>
      <text:p text:style-name="P41">+ 需要兩個。所以從 Stack 拿兩個出來。</text:p>
      <text:p text:style-name="Standard"/>
      <text:p text:style-name="P42">第一次 Pop → B（最後進來的先出來）</text:p>
      <text:p text:style-name="P42">第二次 Pop → A</text:p>
      <text:p text:style-name="P41">把它們組合：A + B = (A+B)</text:p>
      <text:p text:style-name="P41">放回 Stack。</text:p>
      <text:p text:style-name="P53">Stack：[A+B]</text:p>
      <text:p text:style-name="Standard"/>
      <text:p text:style-name="P47">讀到 C</text:p>
      <text:p text:style-name="P41">C 也是一個簡單的算式。放進 Stack。</text:p>
      <text:p text:style-name="P49">Stack：[A+B, C]</text:p>
      <text:p text:style-name="Standard"/>
      <text:p text:style-name="P47">讀到 *</text:p>
      <text:p text:style-name="P41">又遇到一個運算子。* 也需要兩個。</text:p>
      <text:p text:style-name="Standard"/>
      <text:p text:style-name="P42">第一次 Pop → C</text:p>
      <text:p text:style-name="P42">第二次 Pop → A+B</text:p>
      <text:p text:style-name="P41">把它們組合：(A+B) * C = (A+B)*C</text:p>
      <text:p text:style-name="P41">放回 Stack。</text:p>
      <text:p text:style-name="P53">Stack：[A+B)*C]</text:p>
      <text:p text:style-name="Standard"/>
      <text:p text:style-name="P44">完成！Stack 裡剩下的就是原始的算式。</text:p>
      <text:p text:style-name="Standard"/>
      <text:p text:style-name="Standard"><text:soft-page-break/><text:span text:style-name="T39">為什麼先 Pop 出來的是「右邊」？</text:span></text:p>
      <text:p text:style-name="P41">因為 Stack 是 LIFO（Last In First Out）。最後進來的先出來。</text:p>
      <text:p text:style-name="Standard"/>
      <text:p text:style-name="P46">例如：AB-</text:p>
      <text:p text:style-name="P41">A 先進來，B 後進來。</text:p>
      <text:p text:style-name="P41">讀到 -，先 Pop 出 B（後進的），再 Pop 出 A（先進的）。</text:p>
      <text:p text:style-name="P54">所以結果是：A - B（✓ 正確）</text:p>
      <text:p text:style-name="Standard"/>
      <text:p text:style-name="P58">如果反過來（B - A），就完全錯了。</text:p>
      <text:p text:style-name="Standard"/>
      <text:p text:style-name="P40">從算式到樹（最後一步）</text:p>
      <text:p text:style-name="P41">現在你已經理解了 (A+B)*C 這個算式。</text:p>
      <text:p text:style-name="P41">只需要把它畫成樹就可以了。</text:p>
      <text:p text:style-name="Standard"/>
      <text:p text:style-name="P49">*</text:p>
      <text:p text:style-name="P49">/ \</text:p>
      <text:p text:style-name="P49">+ <text:s text:c="2"/>C</text:p>
      <text:p text:style-name="P49">/ \</text:p>
      <text:p text:style-name="P49">A <text:s text:c="2"/>B</text:p>
      <text:p text:style-name="Standard"/>
      <text:p text:style-name="P41">看？這棵樹就是 (A+B)*C 的視覺表示。</text:p>
      <text:p text:style-name="Standard"/>
      <text:p text:style-name="P40">記住最簡單的方式</text:p>
      <text:p text:style-name="P41">不用一開始就記樹的結構。先掌握：</text:p>
      <text:p text:style-name="Standard"/>
      <text:p text:style-name="P55">✓ 遇到字母 → 放進 Stack</text:p>
      <text:p text:style-name="P55">✓ 遇到運算子 → Pop 兩個，組合成新的算式，再放回</text:p>
      <text:p text:style-name="P56">✓ Stack 剩下的就是答案</text:p>
      <text:p text:style-name="Standard"/>
      <text:p text:style-name="P43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39" loext:marker-style-name="T47"><text:span text:style-name="T64">① </text:span><text:span text:style-name="T46">看到 </text:span><text:span text:style-name="T64">A → </text:span><text:span text:style-name="T46">建節點 </text:span><text:span text:style-name="T64">A</text:span><text:span text:style-name="T46">，</text:span><text:span text:style-name="T64">Push</text:span></text:p>
            <text:p text:style-name="P36" loext:marker-style-name="T47"><text:span text:style-name="T64">② </text:span><text:span text:style-name="T46">看到 </text:span><text:span text:style-name="T64">B → </text:span><text:span text:style-name="T46">建節點 </text:span><text:span text:style-name="T64">B</text:span><text:span text:style-name="T46">，</text:span><text:span text:style-name="T64">Push</text:span></text:p>
            <text:p text:style-name="P36" loext:marker-style-name="T47"><text:span text:style-name="T64">③ </text:span><text:span text:style-name="T46">看到 </text:span><text:span text:style-name="T64">+ → Pop B</text:span><text:span text:style-name="T46">（右子樹），</text:span><text:span text:style-name="T64">Pop A</text:span><text:span text:style-name="T46">（左子樹），建 </text:span><text:span text:style-name="T64">+ </text:span><text:span text:style-name="T46">節點，</text:span><text:span text:style-name="T64">Push </text:span><text:span text:style-name="T46">這棵小樹</text:span></text:p>
            <text:p text:style-name="P36" loext:marker-style-name="T47"><text:span text:style-name="T64">④ </text:span><text:span text:style-name="T46">看到 </text:span><text:span text:style-name="T64">C → </text:span><text:span text:style-name="T46">建節點 </text:span><text:span text:style-name="T64">C</text:span><text:span text:style-name="T46">，</text:span><text:span text:style-name="T64">Push</text:span></text:p>
            <text:p text:style-name="P37" loext:marker-style-name="T47"><text:span text:style-name="T64">⑤ </text:span><text:span text:style-name="T46">看到 </text:span><text:span text:style-name="T64">* → Pop C</text:span><text:span text:style-name="T46">（右子樹），</text:span><text:span text:style-name="T64">Pop +</text:span><text:span text:style-name="T46">樹（左子樹），建 </text:span><text:span text:style-name="T64">* </text:span><text:span text:style-name="T46">根節點</text:span></text:p>
            <text:p text:style-name="P31" loext:marker-style-name="T34"><text:span text:style-name="T33">結果：根為 </text:span><text:span text:style-name="T44">*</text:span><text:span text:style-name="T33">，左子樹為 </text:span><text:span text:style-name="T44">+</text:span><text:span text:style-name="T33">（左</text:span><text:span text:style-name="T44">A</text:span><text:span text:style-name="T33">右</text:span><text:span text:style-name="T44">B</text:span><text:span text:style-name="T33">），右子樹為 </text:span><text:span text:style-name="T44">C</text:span></text:p>
          </table:table-cell>
        </table:table-row>
      </table:table>
      <text:h text:style-name="P15" text:outline-level="1" loext:marker-style-name="T13"><text:span text:style-name="T12">第八部分：考試速記總整理</text:span><text:span text:style-name="T13"/></text:h>
      <text:p text:style-name="P2"/>
      <text:h text:style-name="P12" text:outline-level="2" loext:marker-style-name="T30"><text:span text:style-name="T29">六大必背考點（重要度排序）</text:span><text:span text:style-name="T30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Postfix </text:span><text:span text:style-name="T63">用 </text:span><text:span text:style-name="T78">Stack </text:span><text:span text:style-name="T63">求值</text:span></text:p>
          </table:table-cell>
          <table:table-cell table:style-name="表格29.A2" office:value-type="string">
            <text:p text:style-name="P5" loext:marker-style-name="T62"><text:span text:style-name="T63">從左往右，運算元 </text:span><text:span text:style-name="T78">Push</text:span><text:span text:style-name="T63">，運算子 </text:span><text:span text:style-name="T78">Pop </text:span><text:span text:style-name="T63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Infix → Postfix </text:span><text:span text:style-name="T63">轉換</text:span></text:p>
          </table:table-cell>
          <table:table-cell table:style-name="表格29.A2" office:value-type="string">
            <text:p text:style-name="P5" loext:marker-style-name="T62"><text:span text:style-name="T63">五條規則（括號、優先權、左結合）</text:span><text:span text:style-name="T62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Preorder = Prefix</text:span><text:span text:style-name="T62"/></text:p>
            <text:p text:style-name="P5" loext:marker-style-name="T62"><text:span text:style-name="T78">Inorder = Infix</text:span><text:span text:style-name="T62"/></text:p>
            <text:p text:style-name="P5" loext:marker-style-name="T62"><text:span text:style-name="T78">Postorder = Postfix</text:span><text:span text:style-name="T62"/></text:p>
          </table:table-cell>
          <table:table-cell table:style-name="表格29.A2" office:value-type="string">
            <text:p text:style-name="P5" loext:marker-style-name="T62"><text:span text:style-name="T63">走訪方式 ↔ 表示法對應</text:span><text:span text:style-name="T62"/></text:p>
          </table:table-cell>
        </table:table-row>
        <text:soft-page-break/>
        <table:table-row table:style-name="表格29.1">
          <table:table-cell table:style-name="表格29.A5" office:value-type="string">
            <text:p text:style-name="P5" loext:marker-style-name="T62"><text:span text:style-name="T78">★★★★☆</text:span><text:span text:style-name="T62"/></text:p>
          </table:table-cell>
          <table:table-cell table:style-name="表格29.A5" office:value-type="string">
            <text:p text:style-name="P5" loext:marker-style-name="T62"><text:span text:style-name="T78">Expression Tree </text:span><text:span text:style-name="T63">建樹</text:span></text:p>
          </table:table-cell>
          <table:table-cell table:style-name="表格29.A5" office:value-type="string">
            <text:p text:style-name="P5" loext:marker-style-name="T62"><text:span text:style-name="T63">找最後算的運算子 </text:span><text:span text:style-name="T78">= </text:span><text:span text:style-name="T63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2"><text:span text:style-name="T78">★★★★☆</text:span><text:span text:style-name="T62"/></text:p>
          </table:table-cell>
          <table:table-cell table:style-name="表格29.A5" office:value-type="string">
            <text:p text:style-name="P5" loext:marker-style-name="T62"><text:span text:style-name="T78">Prefix </text:span><text:span text:style-name="T63">用 </text:span><text:span text:style-name="T78">Stack </text:span><text:span text:style-name="T63">求值</text:span></text:p>
          </table:table-cell>
          <table:table-cell table:style-name="表格29.A5" office:value-type="string">
            <text:p text:style-name="P5" loext:marker-style-name="T62"><text:span text:style-name="T63">從右往左，先 </text:span><text:span text:style-name="T78">Pop </text:span><text:span text:style-name="T63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2"><text:span text:style-name="T78">★★★☆☆</text:span><text:span text:style-name="T62"/></text:p>
          </table:table-cell>
          <table:table-cell table:style-name="表格29.A7" office:value-type="string">
            <text:p text:style-name="P5" loext:marker-style-name="T62"><text:span text:style-name="T78">Postfix → Expression Tree</text:span><text:span text:style-name="T62"/></text:p>
          </table:table-cell>
          <table:table-cell table:style-name="表格29.A7" office:value-type="string">
            <text:p text:style-name="P5" loext:marker-style-name="T62"><text:span text:style-name="T63">運算元建節點 </text:span><text:span text:style-name="T78">Push</text:span><text:span text:style-name="T63">，運算子合併兩棵子樹</text:span></text:p>
          </table:table-cell>
        </table:table-row>
      </table:table>
      <text:p text:style-name="P6"/>
      <text:h text:style-name="P12" text:outline-level="2" loext:marker-style-name="T30"><text:span text:style-name="T30">Infix → Postfix </text:span><text:span text:style-name="T29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36" loext:marker-style-name="T25"><text:span text:style-name="T25">2. <text:s/>( <text:s/>→ Push</text:span><text:span text:style-name="T25"/></text:p>
            <text:p text:style-name="P36" loext:marker-style-name="T25"><text:span text:style-name="T25">3. <text:s/>) <text:s/>→ Pop 直到 (（括號不輸出）</text:span><text:span text:style-name="T25"/></text:p>
            <text:p text:style-name="P36" loext:marker-style-name="T25"><text:span text:style-name="T25">4. Operator → Stack 頂優先 ≥ 自己 → 先 Pop，再 Push</text:span><text:span text:style-name="T25"/></text:p>
            <text:p text:style-name="P37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12" text:outline-level="2" loext:marker-style-name="T30"><text:span text:style-name="T29">三種表示法互轉速查表</text:span><text:span text:style-name="T30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2"><text:span text:style-name="T78">Prefix </text:span><text:span text:style-name="T63">前置式</text:span></text:p>
          </table:table-cell>
          <table:table-cell table:style-name="表格31.A2" office:value-type="string">
            <text:p text:style-name="Standard" loext:marker-style-name="T62"><text:span text:style-name="T78">+AB</text:span><text:span text:style-name="T62"/></text:p>
          </table:table-cell>
          <table:table-cell table:style-name="表格31.A2" office:value-type="string">
            <text:p text:style-name="Standard" loext:marker-style-name="T62"><text:span text:style-name="T63">運算子在前</text:span><text:span text:style-name="T62"/></text:p>
          </table:table-cell>
          <table:table-cell table:style-name="表格31.A2" office:value-type="string">
            <text:p text:style-name="Standard" loext:marker-style-name="T62"><text:span text:style-name="T78">Stack</text:span><text:span text:style-name="T63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2"><text:span text:style-name="T78">Infix </text:span><text:span text:style-name="T63">中置式</text:span></text:p>
          </table:table-cell>
          <table:table-cell table:style-name="表格31.A3" office:value-type="string">
            <text:p text:style-name="Standard" loext:marker-style-name="T62"><text:span text:style-name="T78">A+B</text:span><text:span text:style-name="T62"/></text:p>
          </table:table-cell>
          <table:table-cell table:style-name="表格31.A3" office:value-type="string">
            <text:p text:style-name="Standard" loext:marker-style-name="T62"><text:span text:style-name="T63">人類習慣寫法，需括號</text:span><text:span text:style-name="T62"/></text:p>
          </table:table-cell>
          <table:table-cell table:style-name="表格31.A3" office:value-type="string">
            <text:p text:style-name="Standard" loext:marker-style-name="T62"><text:span text:style-name="T63">需考慮優先權</text:span><text:span text:style-name="T62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2"><text:span text:style-name="T78">Postfix </text:span><text:span text:style-name="T63">後置式</text:span></text:p>
          </table:table-cell>
          <table:table-cell table:style-name="表格31.A4" office:value-type="string">
            <text:p text:style-name="Standard" loext:marker-style-name="T62"><text:span text:style-name="T78">AB+</text:span><text:span text:style-name="T62"/></text:p>
          </table:table-cell>
          <table:table-cell table:style-name="表格31.A4" office:value-type="string">
            <text:p text:style-name="Standard" loext:marker-style-name="T62"><text:span text:style-name="T63">無括號，電腦最愛</text:span><text:span text:style-name="T62"/></text:p>
          </table:table-cell>
          <table:table-cell table:style-name="表格31.A4" office:value-type="string">
            <text:p text:style-name="Standard" loext:marker-style-name="T62"><text:span text:style-name="T78">Stack</text:span><text:span text:style-name="T63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9" loext:marker-style-name="T22"><text:span text:style-name="T23">最終核心記憶句（一句話串起整章）</text:span><text:span text:style-name="T22"/></text:p>
            <text:p text:style-name="P24" loext:marker-style-name="T41"><text:span text:style-name="T40">「</text:span><text:span text:style-name="T45">Expression Tree </text:span><text:span text:style-name="T40">求值 </text:span><text:span text:style-name="T45">= Postorder </text:span><text:span text:style-name="T40">走訪 </text:span><text:span text:style-name="T45">= Postfix </text:span><text:span text:style-name="T40">計算 </text:span><text:span text:style-name="T45">= Stack</text:span><text:span text:style-name="T40">」</text:span></text:p>
            <text:p text:style-name="P60" loext:marker-style-name="T47"><text:span text:style-name="T46">只要懂這一句，整章 </text:span><text:span text:style-name="T64">Expression Tree </text:span><text:span text:style-name="T46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11T15:38:36.590000000</dc:date>
    <meta:editing-cycles>90</meta:editing-cycles>
    <meta:editing-duration>PT12H8M19S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5" meta:paragraph-count="613" meta:word-count="4139" meta:character-count="7615" meta:non-whitespace-character-count="6201"/>
    <meta:user-defined meta:name="AppVersion">15.0000</meta:user-defined>
  </office:meta>
</office:document-meta>
</file>