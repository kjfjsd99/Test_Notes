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4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3" style:family="table">
      <style:table-properties style:width="16.51cm" fo:margin-left="0.004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25pt solid #cccccc">
        <style:background-image/>
      </style:table-cell-properties>
    </style:style>
    <style:style style:name="表格4" style:family="table">
      <style:table-properties style:width="16.51cm" fo:margin-left="0.004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5" style:family="table">
      <style:table-properties style:width="16.51cm" fo:margin-left="0.004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6" style:family="table">
      <style:table-properties style:width="16.51cm" fo:margin-left="0.004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7" style:family="table">
      <style:table-properties style:width="16.51cm" fo:margin-left="0.004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8" style:family="table">
      <style:table-properties style:width="16.51cm" fo:margin-left="0.004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9" style:family="table">
      <style:table-properties style:width="16.51cm" fo:margin-left="0.004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0" style:family="table">
      <style:table-properties style:width="16.51cm" fo:margin-left="0.004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25pt solid #1e5631">
        <style:background-image/>
      </style:table-cell-properties>
    </style:style>
    <style:style style:name="表格11" style:family="table">
      <style:table-properties style:width="16.51cm" fo:margin-left="0.004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2" style:family="table">
      <style:table-properties style:width="16.51cm" fo:margin-left="0.004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4cm"/>
    </style:style>
    <style:style style:name="表格12.D" style:family="table-column">
      <style:table-column-properties style:column-width="3.53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25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3" style:family="table">
      <style:table-properties style:width="16.51cm" fo:margin-left="0.004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4cm"/>
    </style:style>
    <style:style style:name="表格13.D" style:family="table-column">
      <style:table-column-properties style:column-width="3.53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25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4" style:family="table">
      <style:table-properties style:width="16.51cm" fo:margin-left="0.004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25pt solid #7b3f00">
        <style:background-image/>
      </style:table-cell-properties>
    </style:style>
    <style:style style:name="表格15" style:family="table">
      <style:table-properties style:width="16.51cm" fo:margin-left="0.004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6" style:family="table">
      <style:table-properties style:width="16.51cm" fo:margin-left="0.004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17" style:family="table">
      <style:table-properties style:width="16.51cm" fo:margin-left="0.004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8" style:family="table">
      <style:table-properties style:width="9.525cm" fo:margin-left="0.004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9" style:family="table">
      <style:table-properties style:width="16.51cm" fo:margin-left="0.004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0" style:family="table">
      <style:table-properties style:width="16.51cm" fo:margin-left="0.004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1" style:family="table">
      <style:table-properties style:width="16.51cm" fo:margin-left="0.004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2" style:family="table">
      <style:table-properties style:width="16.51cm" fo:margin-left="0.004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3" style:family="table">
      <style:table-properties style:width="16.51cm" fo:margin-left="0.004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4" style:family="table">
      <style:table-properties style:width="16.51cm" fo:margin-left="0.004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5" style:family="table">
      <style:table-properties style:width="16.51cm" fo:margin-left="0.004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26" style:family="table">
      <style:table-properties style:width="16.51cm" fo:margin-left="0.004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7" style:family="table">
      <style:table-properties style:width="16.51cm" fo:margin-left="0.004cm" fo:margin-top="0cm" fo:margin-bottom="0cm" table:align="left" style:writing-mode="page"/>
    </style:style>
    <style:style style:name="表格27.A" style:family="table-column">
      <style:table-column-properties style:column-width="3.171cm"/>
    </style:style>
    <style:style style:name="表格27.B" style:family="table-column">
      <style:table-column-properties style:column-width="7.689cm"/>
    </style:style>
    <style:style style:name="表格27.C" style:family="table-column">
      <style:table-column-properties style:column-width="5.65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25pt solid #cccccc">
        <style:background-image/>
      </style:table-cell-properties>
    </style:style>
    <style:style style:name="表格28" style:family="table">
      <style:table-properties style:width="16.51cm" fo:margin-left="0.004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9" style:family="table">
      <style:table-properties style:width="16.51cm" fo:margin-left="0.004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2cm"/>
    </style:style>
    <style:style style:name="表格29.C" style:family="table-column">
      <style:table-column-properties style:column-width="8.823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30" style:family="table">
      <style:table-properties style:width="16.51cm" fo:margin-left="0.004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31" style:family="table">
      <style:table-properties style:width="16.51cm" fo:margin-left="0.004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6.51cm" fo:margin-left="0.004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P1" style:family="paragraph" style:parent-style-name="Standard">
      <style:paragraph-properties fo:margin-top="0.353cm" fo:margin-bottom="0cm" style:contextual-spacing="false"/>
    </style:style>
    <style:style style:name="P2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3" style:family="paragraph" style:parent-style-name="Standard">
      <style:paragraph-properties fo:margin-top="0.106cm" fo:margin-bottom="0cm" style:contextual-spacing="false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margin-top="0.035cm" fo:margin-bottom="0.035cm" style:contextual-spacing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071cm" fo:margin-bottom="0.035cm" style:contextual-spacing="false"/>
    </style:style>
    <style:style style:name="P8" style:family="paragraph" style:parent-style-name="Standard">
      <style:paragraph-properties fo:margin-top="0.141cm" fo:margin-bottom="0cm" style:contextual-spacing="false"/>
    </style:style>
    <style:style style:name="P9" style:family="paragraph" style:parent-style-name="Standard">
      <style:paragraph-properties fo:margin-top="0.035cm" fo:margin-bottom="0.071cm" style:contextual-spacing="false"/>
    </style:style>
    <style:style style:name="P10" style:family="paragraph" style:parent-style-name="Standard">
      <style:paragraph-properties fo:margin-top="0.176cm" fo:margin-bottom="0cm" style:contextual-spacing="false"/>
    </style:style>
    <style:style style:name="P11" style:family="paragraph" style:parent-style-name="Standard">
      <style:paragraph-properties fo:margin-top="0.071cm" fo:margin-bottom="0cm" style:contextual-spacing="false"/>
    </style:style>
    <style:style style:name="P12" style:family="paragraph" style:parent-style-name="Heading_20_2">
      <style:paragraph-properties fo:margin-left="0cm" fo:margin-right="0cm" fo:margin-top="0.494cm" fo:margin-bottom="0.176cm" style:contextual-spacing="false" fo:text-indent="0cm" style:auto-text-indent="false"/>
    </style:style>
    <style:style style:name="P13" style:family="paragraph" style:parent-style-name="Heading_20_1">
      <style:paragraph-properties fo:margin-left="0cm" fo:margin-right="0cm" fo:margin-top="0.635cm" fo:margin-bottom="0.212cm" style:contextual-spacing="false" fo:text-indent="0cm" style:auto-text-indent="false"/>
    </style:style>
    <style:style style:name="P1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15" style:family="paragraph" style:parent-style-name="Heading_20_1">
      <style:paragraph-properties fo:margin-left="0cm" fo:margin-right="0cm" fo:margin-top="0cm" fo:margin-bottom="0.212cm" style:contextual-spacing="false" fo:text-indent="0cm" style:auto-text-indent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.141cm" fo:margin-bottom="0cm" style:contextual-spacing="false" fo:text-align="center" style:justify-single-word="false"/>
    </style:style>
    <style:style style:name="P18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P19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20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1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22" style:family="paragraph" style:parent-style-name="Standard">
      <style:paragraph-properties fo:margin-top="0.071cm" fo:margin-bottom="0.018cm" style:contextual-spacing="false" fo:text-align="center" style:justify-single-word="false"/>
    </style:style>
    <style:style style:name="P23" style:family="paragraph" style:parent-style-name="Standard">
      <style:paragraph-properties fo:margin-top="0.053cm" fo:margin-bottom="0.053cm" style:contextual-spacing="false" fo:text-align="center" style:justify-single-word="false"/>
    </style:style>
    <style:style style:name="P24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5" style:family="paragraph" style:parent-style-name="Standard">
      <style:paragraph-properties fo:margin-top="0.106cm" fo:margin-bottom="0.106cm" style:contextual-spacing="false"/>
    </style:style>
    <style:style style:name="P26" style:family="paragraph" style:parent-style-name="Standard">
      <style:paragraph-properties fo:margin-top="0.071cm" fo:margin-bottom="0.071cm" style:contextual-spacing="false"/>
    </style:style>
    <style:style style:name="P27" style:family="paragraph" style:parent-style-name="Standard">
      <style:paragraph-properties fo:margin-top="0.035cm" fo:margin-bottom="0.035cm" style:contextual-spacing="false"/>
    </style:style>
    <style:style style:name="P28" style:family="paragraph" style:parent-style-name="Standard">
      <style:paragraph-properties fo:margin-top="0.071cm" fo:margin-bottom="0.035cm" style:contextual-spacing="false"/>
    </style:style>
    <style:style style:name="P29" style:family="paragraph" style:parent-style-name="Standard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P30" style:family="paragraph" style:parent-style-name="Standard">
      <style:paragraph-properties fo:margin-top="0.035cm" fo:margin-bottom="0.071cm" style:contextual-spacing="false"/>
    </style:style>
    <style:style style:name="P31" style:family="paragraph" style:parent-style-name="Standard">
      <style:paragraph-properties fo:margin-top="0cm" fo:margin-bottom="0.035cm" style:contextual-spacing="false"/>
    </style:style>
    <style:style style:name="P32" style:family="paragraph" style:parent-style-name="Standard">
      <style:paragraph-properties fo:margin-top="0.353cm" fo:margin-bottom="0.141cm" style:contextual-spacing="false"/>
    </style:style>
    <style:style style:name="P33" style:family="paragraph" style:parent-style-name="Standard">
      <style:paragraph-properties fo:margin-top="0.071cm" fo:margin-bottom="0.018cm" style:contextual-spacing="false"/>
    </style:style>
    <style:style style:name="P34" style:family="paragraph" style:parent-style-name="Standard">
      <style:paragraph-properties fo:margin-top="0cm" fo:margin-bottom="0.018cm" style:contextual-spacing="false"/>
    </style:style>
    <style:style style:name="P35" style:family="paragraph" style:parent-style-name="Standard">
      <style:paragraph-properties fo:margin-top="0cm" fo:margin-bottom="0.106cm" style:contextual-spacing="false"/>
    </style:style>
    <style:style style:name="P36" style:family="paragraph" style:parent-style-name="Standard">
      <style:paragraph-properties fo:margin-top="0.018cm" fo:margin-bottom="0.018cm" style:contextual-spacing="false"/>
    </style:style>
    <style:style style:name="P37" style:family="paragraph" style:parent-style-name="Standard">
      <style:paragraph-properties fo:margin-top="0.018cm" fo:margin-bottom="0.071cm" style:contextual-spacing="false"/>
    </style:style>
    <style:style style:name="P38" style:family="paragraph" style:parent-style-name="Standard">
      <style:paragraph-properties fo:margin-top="0.018cm" fo:margin-bottom="0.035cm" style:contextual-spacing="false"/>
    </style:style>
    <style:style style:name="P39" style:family="paragraph" style:parent-style-name="Standard">
      <style:paragraph-properties fo:margin-top="0.035cm" fo:margin-bottom="0.018cm" style:contextual-spacing="false"/>
    </style:style>
    <style:style style:name="P40" style:family="paragraph" style:parent-style-name="Standard">
      <style:text-properties fo:color="#1a6b72" loext:opacity="100%" style:font-name="Arial" fo:font-size="13pt" fo:font-weight="bold" style:font-name-asian="Arial2" style:font-size-asian="13pt" style:font-weight-asian="bold"/>
    </style:style>
    <style:style style:name="P41" style:family="paragraph" style:parent-style-name="Standard">
      <style:text-properties fo:color="#444444" loext:opacity="100%" style:font-name="Arial" fo:font-size="11pt" style:font-name-asian="Arial2" style:font-size-asian="11pt"/>
    </style:style>
    <style:style style:name="P42" style:family="paragraph" style:parent-style-name="Standard">
      <style:paragraph-properties fo:margin-left="0.762cm" fo:margin-right="0cm" fo:text-indent="0cm" style:auto-text-indent="false"/>
      <style:text-properties fo:color="#444444" loext:opacity="100%" style:font-name="Arial" fo:font-size="11pt" style:font-name-asian="Arial2" style:font-size-asian="11pt"/>
    </style:style>
    <style:style style:name="P43" style:family="paragraph" style:parent-style-name="Standard">
      <style:text-properties fo:color="#444444" loext:opacity="100%" style:font-name="Arial" fo:font-size="11pt" fo:font-style="italic" style:font-name-asian="Arial2" style:font-size-asian="11pt" style:font-style-asian="italic"/>
    </style:style>
    <style:style style:name="P44" style:family="paragraph" style:parent-style-name="Standard">
      <style:text-properties fo:color="#444444" loext:opacity="100%" style:font-name="Arial" fo:font-size="11pt" fo:font-weight="bold" style:font-name-asian="Arial2" style:font-size-asian="11pt" style:font-weight-asian="bold"/>
    </style:style>
    <style:style style:name="P45" style:family="paragraph" style:parent-style-name="Standard">
      <style:text-properties fo:color="#1f3864" loext:opacity="100%" style:font-name="Arial" fo:font-size="11pt" fo:font-weight="bold" style:font-name-asian="Arial2" style:font-size-asian="11pt" style:font-weight-asian="bold"/>
    </style:style>
    <style:style style:name="P46" style:family="paragraph" style:parent-style-name="Standard">
      <style:text-properties fo:color="#1f3864" loext:opacity="100%" style:font-name="Arial" fo:font-size="12pt" fo:font-weight="bold" style:font-name-asian="Arial2" style:font-size-asian="12pt" style:font-weight-asian="bold"/>
    </style:style>
    <style:style style:name="P47" style:family="paragraph" style:parent-style-name="Standard">
      <style:text-properties fo:color="#1f3864" loext:opacity="100%" style:font-name="Courier New" fo:font-size="11pt" fo:font-weight="bold" style:font-name-asian="Courier New1" style:font-size-asian="11pt" style:font-weight-asian="bold"/>
    </style:style>
    <style:style style:name="P48" style:family="paragraph" style:parent-style-name="Standard">
      <style:text-properties fo:color="#1f3864" loext:opacity="100%" style:font-name="Courier New" fo:font-size="10pt" style:font-name-asian="Courier New1" style:font-size-asian="10pt"/>
    </style:style>
    <style:style style:name="P49" style:family="paragraph" style:parent-style-name="Standard">
      <style:paragraph-properties fo:margin-left="0.762cm" fo:margin-right="0cm" fo:text-indent="0cm" style:auto-text-indent="false"/>
      <style:text-properties fo:color="#1f3864" loext:opacity="100%" style:font-name="Courier New" fo:font-size="10pt" style:font-name-asian="Courier New1" style:font-size-asian="10pt"/>
    </style:style>
    <style:style style:name="P50" style:family="paragraph" style:parent-style-name="Standard">
      <style:text-properties fo:color="#ff7f00" loext:opacity="100%" style:font-name="Arial" fo:font-size="13pt" fo:font-weight="bold" style:font-name-asian="Arial2" style:font-size-asian="13pt" style:font-weight-asian="bold"/>
    </style:style>
    <style:style style:name="P51" style:family="paragraph" style:parent-style-name="Standard">
      <style:text-properties fo:color="#22b14c" loext:opacity="100%" style:font-name="Courier New" fo:font-size="10pt" style:font-name-asian="Courier New1" style:font-size-asian="10pt"/>
    </style:style>
    <style:style style:name="P52" style:family="paragraph" style:parent-style-name="Standard">
      <style:text-properties fo:color="#22b14c" loext:opacity="100%" style:font-name="Courier New" fo:font-size="10pt" fo:font-weight="bold" style:font-name-asian="Courier New1" style:font-size-asian="10pt" style:font-weight-asian="bold"/>
    </style:style>
    <style:style style:name="P53" style:family="paragraph" style:parent-style-name="Standard">
      <style:text-properties fo:color="#22b14c" loext:opacity="100%" style:font-name="Arial" fo:font-size="11pt" fo:font-weight="bold" style:font-name-asian="Arial2" style:font-size-asian="11pt" style:font-weight-asian="bold"/>
    </style:style>
    <style:style style:name="P54" style:family="paragraph" style:parent-style-name="Standard">
      <style:paragraph-properties fo:margin-left="0.762cm" fo:margin-right="0cm" fo:text-indent="0cm" style:auto-text-indent="false"/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5" style:family="paragraph" style:parent-style-name="Standard"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6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/>
    </style:style>
    <style:style style:name="P57" style:family="paragraph" style:parent-style-name="Standard">
      <style:text-properties fo:color="#c00000" loext:opacity="100%" style:font-name="Arial" fo:font-size="11pt" style:font-name-asian="Arial2" style:font-size-asian="11pt"/>
    </style:style>
    <style:style style:name="P58" style:family="paragraph" style:parent-style-name="Standard">
      <style:paragraph-properties fo:margin-top="0.106cm" fo:margin-bottom="0.035cm" style:contextual-spacing="false"/>
    </style:style>
    <style:style style:name="P59" style:family="paragraph" style:parent-style-name="Standard">
      <style:paragraph-properties fo:margin-top="0cm" fo:margin-bottom="0.071cm" style:contextual-spacing="false"/>
    </style:style>
    <style:style style:name="T1" style:family="text">
      <style:text-properties fo:color="#ffffff" loext:opacity="100%" style:font-name="Arial" fo:font-size="24pt" fo:font-weight="bold" style:font-size-asian="24pt" style:font-weight-asian="bold" style:font-name-complex="Arial2" style:font-size-complex="24pt" style:font-weight-complex="bold"/>
    </style:style>
    <style:style style:name="T2" style:family="text">
      <style:text-properties fo:color="#ffffff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" style:family="text">
      <style:text-properties fo:color="#ffffff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6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7" style:family="text">
      <style:text-properties fo:color="#ffffff" loext:opacity="100%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8" style:family="text">
      <style:text-properties fo:color="#ffffff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9" style:family="text">
      <style:text-properties fo:color="#a8d8dc" loext:opacity="100%" style:font-name="Arial" fo:font-size="12pt" style:font-size-asian="12pt" style:font-name-complex="Arial2" style:font-size-complex="12pt"/>
    </style:style>
    <style:style style:name="T10" style:family="text">
      <style:text-properties fo:color="#a8d8dc" loext:opacity="100%" style:font-name="Arial" fo:font-size="12pt" style:font-name-asian="Arial2" style:font-size-asian="12pt" style:font-name-complex="Arial2" style:font-size-complex="12pt"/>
    </style:style>
    <style:style style:name="T11" style:family="text">
      <style:text-properties fo:color="#a8d8dc" loext:opacity="100%" fo:font-size="12pt" style:font-name-asian="Arial2" style:font-size-asian="12pt" style:font-name-complex="Arial2" style:font-size-complex="12pt"/>
    </style:style>
    <style:style style:name="T12" style:family="text">
      <style:text-properties fo:color="#1f3864" loext:opacity="100%" style:font-name="Arial" fo:font-size="18pt" fo:font-weight="bold" style:font-size-asian="18pt" style:font-weight-asian="bold" style:font-name-complex="Arial2" style:font-size-complex="18pt" style:font-weight-complex="bold"/>
    </style:style>
    <style:style style:name="T13" style:family="text"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14" style:family="text">
      <style:text-properties fo:color="#1f3864" loext:opacity="100%" style:font-name="Arial" fo:font-size="18pt" fo:font-weight="bold" fo:background-color="#ffd740" loext:char-shading-value="0" style:font-name-asian="Arial2" style:font-size-asian="18pt" style:font-weight-asian="bold" style:font-name-complex="Arial2" style:font-size-complex="18pt" style:font-weight-complex="bold"/>
    </style:style>
    <style:style style:name="T15" style:family="text">
      <style:text-properties fo:color="#1f3864" loext:opacity="100%" style:font-name="Arial" fo:font-size="18pt" fo:font-weight="bold" fo:background-color="#ffd740" loext:char-shading-value="0" style:font-size-asian="18pt" style:font-weight-asian="bold" style:font-name-complex="Arial2" style:font-size-complex="18pt" style:font-weight-complex="bold"/>
    </style:style>
    <style:style style:name="T16" style:family="text">
      <style:text-properties fo:color="#1f3864" loext:opacity="100%" style:font-name="Arial" fo:font-size="18pt" fo:font-weight="bold" fo:background-color="#ffab40" loext:char-shading-value="0" style:font-size-asian="18pt" style:font-weight-asian="bold" style:font-name-complex="Arial2" style:font-size-complex="18pt" style:font-weight-complex="bold"/>
    </style:style>
    <style:style style:name="T17" style:family="text">
      <style:text-properties fo:color="#1f3864" loext:opacity="100%" style:font-name="Arial" fo:font-size="18pt" fo:font-weight="bold" fo:background-color="#ffab40" loext:char-shading-value="0" style:font-name-asian="Arial2" style:font-size-asian="18pt" style:font-weight-asian="bold" style:font-name-complex="Arial2" style:font-size-complex="18pt" style:font-weight-complex="bold"/>
    </style:style>
    <style:style style:name="T18" style:family="text">
      <style:text-properties fo:color="#1f3864" loext:opacity="100%" style:font-name="Arial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" style:family="text">
      <style:text-properties fo:color="#1f3864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21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1f38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3" style:family="text">
      <style:text-properties fo:color="#1f3864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24" style:family="text"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25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26" style:family="text"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T27" style:family="text"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T28" style:family="text">
      <style:text-properties fo:color="#1f3864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color="#1a6b7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30" style:family="text">
      <style:text-properties fo:color="#1a6b72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31" style:family="text">
      <style:text-properties fo:color="#1a6b72" loext:opacity="100%" style:font-name="Arial" fo:font-size="14pt" fo:font-weight="bold" fo:background-color="#ffff00" loext:char-shading-value="0" style:font-name-asian="Arial2" style:font-size-asian="14pt" style:font-weight-asian="bold" style:font-name-complex="Arial2" style:font-size-complex="14pt" style:font-weight-complex="bold"/>
    </style:style>
    <style:style style:name="T32" style:family="text">
      <style:text-properties fo:color="#1a6b72" loext:opacity="100%" style:font-name="Arial" fo:font-size="14pt" fo:font-weight="bold" fo:background-color="#ffd740" loext:char-shading-value="0" style:font-size-asian="14pt" style:font-weight-asian="bold" style:font-name-complex="Arial2" style:font-size-complex="14pt" style:font-weight-complex="bold"/>
    </style:style>
    <style:style style:name="T33" style:family="text">
      <style:text-properties fo:color="#1a6b72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34" style:family="text">
      <style:text-properties fo:color="#1a6b7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1a6b72" loext:opacity="100%" style:font-name="Arial" fo:font-size="10pt" style:font-size-asian="10pt" style:font-name-complex="Arial2" style:font-size-complex="10pt"/>
    </style:style>
    <style:style style:name="T36" style:family="text">
      <style:text-properties fo:color="#1a6b72" loext:opacity="100%" style:font-name="Arial" fo:font-size="10pt" style:font-name-asian="Arial2" style:font-size-asian="10pt" style:font-name-complex="Arial2" style:font-size-complex="10pt"/>
    </style:style>
    <style:style style:name="T37" style:family="text">
      <style:text-properties fo:color="#1a6b72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8" style:family="text">
      <style:text-properties fo:color="#1a6b7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9" style:family="text">
      <style:text-properties fo:color="#1a6b72" loext:opacity="100%" style:font-name="Arial" fo:font-size="13pt" fo:font-weight="bold" style:font-name-asian="Arial2" style:font-size-asian="13pt" style:font-weight-asian="bold"/>
    </style:style>
    <style:style style:name="T40" style:family="text">
      <style:text-properties fo:color="#1a6b72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41" style:family="text">
      <style:text-properties fo:color="#1a6b72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2" style:family="text">
      <style:text-properties fo:color="#1a6b72" loext:opacity="100%" fo:font-size="10pt" style:font-name-asian="Arial2" style:font-size-asian="10pt" style:font-name-complex="Arial2" style:font-size-complex="10pt"/>
    </style:style>
    <style:style style:name="T43" style:family="text">
      <style:text-properties fo:color="#1a6b72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4" style:family="text">
      <style:text-properties fo:color="#1a6b72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1a6b72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6" style:family="text">
      <style:text-properties fo:color="#444444" loext:opacity="100%" style:font-name="Arial" fo:font-size="11pt" style:font-size-asian="11pt" style:font-name-complex="Arial2" style:font-size-complex="11pt"/>
    </style:style>
    <style:style style:name="T47" style:family="text">
      <style:text-properties fo:color="#444444" loext:opacity="100%" style:font-name="Arial" fo:font-size="11pt" style:font-name-asian="Arial2" style:font-size-asian="11pt" style:font-name-complex="Arial2" style:font-size-complex="11pt"/>
    </style:style>
    <style:style style:name="T48" style:family="text">
      <style:text-properties fo:color="#4444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9" style:family="text">
      <style:text-properties fo:color="#444444" loext:opacity="100%" style:font-name="Arial" fo:font-size="11pt" fo:font-weight="bold" fo:background-color="#ffd740" loext:char-shading-value="0" style:font-size-asian="11pt" style:font-weight-asian="bold" style:font-name-complex="Arial2" style:font-size-complex="11pt" style:font-weight-complex="bold"/>
    </style:style>
    <style:style style:name="T50" style:family="text">
      <style:text-properties fo:color="#444444" loext:opacity="100%" style:font-name="Arial" fo:font-size="11pt" fo:font-weight="bold" fo:background-color="#c6ff00" loext:char-shading-value="0" style:font-size-asian="11pt" style:font-weight-asian="bold" style:font-name-complex="Arial2" style:font-size-complex="11pt" style:font-weight-complex="bold"/>
    </style:style>
    <style:style style:name="T51" style:family="text">
      <style:text-properties fo:color="#444444" loext:opacity="100%" style:font-name="Arial" fo:font-size="11pt" fo:font-weight="bold" fo:background-color="#b2ff59" loext:char-shading-value="0" style:font-size-asian="11pt" style:font-weight-asian="bold" style:font-name-complex="Arial2" style:font-size-complex="11pt" style:font-weight-complex="bold"/>
    </style:style>
    <style:style style:name="T52" style:family="text">
      <style:text-properties fo:color="#444444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53" style:family="text">
      <style:text-properties fo:color="#44444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4" style:family="text">
      <style:text-properties fo:color="#444444" loext:opacity="100%" style:font-name="Arial" fo:font-size="10pt" style:font-size-asian="10pt" style:font-name-complex="Arial2" style:font-size-complex="10pt"/>
    </style:style>
    <style:style style:name="T55" style:family="text"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T56" style:family="text">
      <style:text-properties fo:color="#444444" loext:opacity="100%" style:font-name="Arial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57" style:family="text">
      <style:text-properties fo:color="#444444" loext:opacity="100%" style:font-name="Arial" fo:font-size="10pt" fo:font-weight="bold" fo:background-color="#ffd740" loext:char-shading-value="0" style:font-size-asian="10pt" style:font-weight-asian="bold" style:font-name-complex="Arial2" style:font-size-complex="10pt" style:font-weight-complex="bold"/>
    </style:style>
    <style:style style:name="T58" style:family="text">
      <style:text-properties fo:color="#4444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59" style:family="text">
      <style:text-properties fo:color="#444444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60" style:family="text">
      <style:text-properties fo:color="#444444" loext:opacity="100%"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61" style:family="text">
      <style:text-properties fo:color="#444444" loext:opacity="100%" style:font-name="Arial" fo:font-size="9pt" fo:font-weight="normal" style:font-size-asian="9pt" style:font-weight-asian="normal" style:font-name-complex="Arial2" style:font-size-complex="9pt" style:font-weight-complex="normal"/>
    </style:style>
    <style:style style:name="T62" style:family="text">
      <style:text-properties fo:color="#444444" loext:opacity="100%" style:font-name="Arial" fo:font-size="9pt" style:font-name-asian="Arial2" style:font-size-asian="9pt" style:font-name-complex="Arial2" style:font-size-complex="9pt"/>
    </style:style>
    <style:style style:name="T63" style:family="text">
      <style:text-properties fo:color="#444444" loext:opacity="100%" style:font-name="Arial" fo:font-size="9pt" style:font-size-asian="9pt" style:font-name-complex="Arial2" style:font-size-complex="9pt"/>
    </style:style>
    <style:style style:name="T64" style:family="text">
      <style:text-properties fo:color="#444444" loext:opacity="100%" fo:font-size="11pt" style:font-name-asian="Arial2" style:font-size-asian="11pt" style:font-name-complex="Arial2" style:font-size-complex="11pt"/>
    </style:style>
    <style:style style:name="T65" style:family="text">
      <style:text-properties fo:color="#444444" loext:opacity="100%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66" style:family="text">
      <style:text-properties fo:color="#444444" loext:opacity="100%" fo:font-size="11pt" fo:font-weight="bold" fo:background-color="#c6ff00" loext:char-shading-value="0" style:font-name-asian="Arial2" style:font-size-asian="11pt" style:font-weight-asian="bold" style:font-name-complex="Arial2" style:font-size-complex="11pt" style:font-weight-complex="bold"/>
    </style:style>
    <style:style style:name="T67" style:family="text">
      <style:text-properties fo:color="#4444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8" style:family="text"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69" style:family="text">
      <style:text-properties fo:color="#444444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70" style:family="text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T71" style:family="text">
      <style:text-properties fo:color="#4444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2" style:family="text">
      <style:text-properties fo:color="#444444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3" style:family="text">
      <style:text-properties fo:color="#44444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74" style:family="text">
      <style:text-properties fo:color="#444444" loext:opacity="100%" fo:font-size="10pt" style:font-name-asian="Arial2" style:font-size-asian="10pt" style:font-name-complex="Arial2" style:font-size-complex="10pt"/>
    </style:style>
    <style:style style:name="T75" style:family="text">
      <style:text-properties fo:color="#444444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76" style:family="text">
      <style:text-properties fo:color="#4444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77" style:family="text">
      <style:text-properties fo:color="#444444" loext:opacity="100%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78" style:family="text">
      <style:text-properties fo:color="#444444" loext:opacity="100%" fo:font-size="9pt" style:font-name-asian="Arial2" style:font-size-asian="9pt" style:font-name-complex="Arial2" style:font-size-complex="9pt"/>
    </style:style>
    <style:style style:name="T79" style:family="text">
      <style:text-properties fo:color="#c9211e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80" style:family="text">
      <style:text-properties fo:color="#c9211e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81" style:family="text">
      <style:text-properties fo:color="#ff3d00" loext:opacity="100%" style:font-name="Arial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82" style:family="text">
      <style:text-properties fo:color="#ff3d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83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84" style:family="text">
      <style:text-properties fo:color="#ff3d00" loext:opacity="100%" style:font-name="Arial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5" style:family="text">
      <style:text-properties fo:color="#ff3d00" loext:opacity="100%" style:font-name="Arial" fo:font-size="13pt" fo:font-weight="bold" fo:background-color="#64ffda" loext:char-shading-value="0" style:font-size-asian="13pt" style:font-weight-asian="bold" style:font-name-complex="Arial2" style:font-size-complex="13pt" style:font-weight-complex="bold"/>
    </style:style>
    <style:style style:name="T86" style:family="text">
      <style:text-properties fo:color="#ff3d00" loext:opacity="100%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87" style:family="text">
      <style:text-properties fo:color="#ff3d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88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9" style:family="text">
      <style:text-properties fo:color="#ff3d00" loext:opacity="100%" style:font-name="Courier New" fo:font-size="10pt" fo:font-weight="bold" fo:background-color="#64ffda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90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1" style:family="text">
      <style:text-properties fo:color="#ff3d00" loext:opacity="100%" fo:font-size="9pt" fo:font-weight="bold" fo:background-color="#64ffda" loext:char-shading-value="0" style:font-name-asian="Arial2" style:font-size-asian="9pt" style:font-weight-asian="bold" style:font-name-complex="Arial2" style:font-size-complex="9pt" style:font-weight-complex="bold"/>
    </style:style>
    <style:style style:name="T92" style:family="text">
      <style:text-properties fo:color="#18ffff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93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4" style:family="text">
      <style:text-properties fo:color="#18ffff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95" style:family="text">
      <style:text-properties fo:color="#18ffff" loext:opacity="100%" fo:font-size="10pt" fo:font-weight="bold" fo:background-color="#e040fb" loext:char-shading-value="0" style:font-name-asian="Arial2" style:font-size-asian="10pt" style:font-weight-asian="bold" style:font-name-complex="Arial2" style:font-size-complex="10pt" style:font-weight-complex="bold"/>
    </style:style>
    <style:style style:name="T96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97" style:family="text">
      <style:text-properties fo:color="#18ffff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98" style:family="text">
      <style:text-properties fo:color="#18ffff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99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100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01" style:family="text">
      <style:text-properties fo:color="#18ffff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02" style:family="text">
      <style:text-properties fo:color="#18ffff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03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4" style:family="text">
      <style:text-properties fo:color="#18ffff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5" style:family="text">
      <style:text-properties fo:color="#18ffff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6" style:family="text">
      <style:text-properties fo:color="#18ffff" loext:opacity="100%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107" style:family="text">
      <style:text-properties fo:color="#e040fb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08" style:family="text">
      <style:text-properties fo:color="#e040fb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09" style:family="text">
      <style:text-properties fo:color="#7b3f00" loext:opacity="100%" fo:font-size="11pt" style:font-name-asian="Arial2" style:font-size-asian="11pt" style:font-name-complex="Arial2" style:font-size-complex="11pt"/>
    </style:style>
    <style:style style:name="T110" style:family="text">
      <style:text-properties fo:color="#7b3f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1" style:family="text">
      <style:text-properties fo:color="#7b3f00" loext:opacity="100%" style:font-name="Arial" fo:font-size="11pt" style:font-size-asian="11pt" style:font-name-complex="Arial2" style:font-size-complex="11pt"/>
    </style:style>
    <style:style style:name="T112" style:family="text">
      <style:text-properties fo:color="#7b3f00" loext:opacity="100%" style:font-name="Arial" fo:font-size="11pt" style:font-name-asian="Arial2" style:font-size-asian="11pt" style:font-name-complex="Arial2" style:font-size-complex="11pt"/>
    </style:style>
    <style:style style:name="T113" style:family="text">
      <style:text-properties fo:color="#7b3f00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14" style:family="text">
      <style:text-properties fo:color="#7b3f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5" style:family="text">
      <style:text-properties fo:color="#7b3f00" loext:opacity="100%" style:font-name="Arial" fo:font-size="10pt" style:font-size-asian="10pt" style:font-name-complex="Arial2" style:font-size-complex="10pt"/>
    </style:style>
    <style:style style:name="T116" style:family="text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T117" style:family="text">
      <style:text-properties fo:color="#7b3f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8" style:family="text">
      <style:text-properties fo:color="#7b3f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19" style:family="text">
      <style:text-properties fo:color="#7b3f00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20" style:family="text">
      <style:text-properties fo:color="#7b3f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1" style:family="text">
      <style:text-properties fo:color="#7b3f00" loext:opacity="100%" fo:font-size="10pt" style:font-name-asian="Arial2" style:font-size-asian="10pt" style:font-name-complex="Arial2" style:font-size-complex="10pt"/>
    </style:style>
    <style:style style:name="T122" style:family="text">
      <style:text-properties fo:color="#7b3f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3" style:family="text">
      <style:text-properties fo:color="#7b3f00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4" style:family="text">
      <style:text-properties fo:color="#7b3f00" loext:opacity="100%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25" style:family="text">
      <style:text-properties fo:color="#ff17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26" style:family="text">
      <style:text-properties fo:color="#ff17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27" style:family="text">
      <style:text-properties fo:color="#ff17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28" style:family="text">
      <style:text-properties fo:color="#ff17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9" style:family="text">
      <style:text-properties fo:color="#ff17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30" style:family="text">
      <style:text-properties fo:color="#1e5631" loext:opacity="100%" fo:font-size="10pt" style:font-name-asian="Arial2" style:font-size-asian="10pt" style:font-name-complex="Arial2" style:font-size-complex="10pt"/>
    </style:style>
    <style:style style:name="T131" style:family="text">
      <style:text-properties fo:color="#1e5631" loext:opacity="100%" style:font-name="Arial" fo:font-size="10pt" style:font-size-asian="10pt" style:font-name-complex="Arial2" style:font-size-complex="10pt"/>
    </style:style>
    <style:style style:name="T132" style:family="text">
      <style:text-properties fo:color="#1e5631" loext:opacity="100%" style:font-name="Arial" fo:font-size="10pt" style:font-name-asian="Arial2" style:font-size-asian="10pt" style:font-name-complex="Arial2" style:font-size-complex="10pt"/>
    </style:style>
    <style:style style:name="T133" style:family="text">
      <style:text-properties fo:color="#1e5631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34" style:family="text">
      <style:text-properties fo:color="#1e563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5" style:family="text">
      <style:text-properties fo:color="#1e5631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136" style:family="text">
      <style:text-properties fo:color="#1e5631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37" style:family="text">
      <style:text-properties fo:color="#1e5631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8" style:family="text"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T139" style:family="text"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140" style:family="text">
      <style:text-properties fo:color="#1e5631" loext:opacity="100%" style:font-name="Courier New" fo:font-size="11pt" fo:font-weight="bold" fo:background-color="#ffff0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41" style:family="text">
      <style:text-properties fo:color="#1e5631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42" style:family="text">
      <style:text-properties fo:color="#ffd740" loext:opacity="100%" style:font-name="Arial" fo:font-size="10pt" fo:font-weight="bold" fo:background-color="#ff1744" loext:char-shading-value="0" style:font-size-asian="10pt" style:font-weight-asian="bold" style:font-name-complex="Arial2" style:font-size-complex="10pt" style:font-weight-complex="bold"/>
    </style:style>
    <style:style style:name="T143" style:family="text">
      <style:text-properties fo:color="#ffd74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44" style:family="text">
      <style:text-properties fo:color="#ffff00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45" style:family="text">
      <style:text-properties fo:color="#ffff00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46" style:family="text">
      <style:text-properties fo:color="#ffff00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47" style:family="text">
      <style:text-properties fo:color="#ffff00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48" style:family="text">
      <style:text-properties fo:color="#ffff00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49" style:family="text">
      <style:text-properties fo:color="#ffff0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50" style:family="text">
      <style:text-properties fo:color="#ffff00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51" style:family="text">
      <style:text-properties fo:color="#ffff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52" style:family="text">
      <style:text-properties fo:color="#ffff00" loext:opacity="100%" style:font-name="Courier New" fo:font-size="11pt" fo:font-weight="bold" fo:background-color="#ef535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53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54" style:family="text">
      <style:text-properties fo:color="#76ff03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55" style:family="text">
      <style:text-properties fo:color="#76ff03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56" style:family="text">
      <style:text-properties fo:color="#76ff03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57" style:family="text">
      <style:text-properties fo:color="#76ff03" loext:opacity="100%" style:font-name="Arial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58" style:family="text">
      <style:text-properties fo:color="#76ff03" loext:opacity="100%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59" style:family="text">
      <style:text-properties fo:color="#76ff03" loext:opacity="100%" fo:font-size="9pt" fo:font-weight="bold" fo:background-color="#3d5afe" loext:char-shading-value="0" style:font-name-asian="Arial2" style:font-size-asian="9pt" style:font-weight-asian="bold" style:font-name-complex="Arial2" style:font-size-complex="9pt" style:font-weight-complex="bold"/>
    </style:style>
    <style:style style:name="T160" style:family="text">
      <style:text-properties fo:color="#8b0000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61" style:family="text">
      <style:text-properties fo:color="#8b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62" style:family="text">
      <style:text-properties fo:color="#8b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63" style:family="text">
      <style:text-properties fo:color="#8b0000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64" style:family="text">
      <style:text-properties fo:color="#8b00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65" style:family="text"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T166" style:family="text">
      <style:text-properties fo:color="#eeff41" loext:opacity="100%" style:font-name="Arial" fo:font-size="13pt" fo:font-weight="bold" fo:background-color="#3d5afe" loext:char-shading-value="0" style:font-size-asian="13pt" style:font-weight-asian="bold" style:font-name-complex="Arial2" style:font-size-complex="13pt" style:font-weight-complex="bold"/>
    </style:style>
    <style:style style:name="T167" style:family="text">
      <style:text-properties fo:color="#ff4081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68" style:family="text">
      <style:text-properties fo:color="#ff4081" loext:opacity="100%" style:font-name="Arial" fo:font-size="11pt" fo:font-weight="bold" fo:background-color="#ffffff" loext:char-shading-value="0" style:font-size-asian="11pt" style:font-weight-asian="bold" style:font-name-complex="Arial2" style:font-size-complex="11pt" style:font-weight-complex="bold"/>
    </style:style>
    <style:style style:name="T169" style:family="text">
      <style:text-properties fo:color="#ff4081" loext:opacity="100%" fo:font-size="11pt" fo:font-weight="bold" fo:background-color="#ffffff" loext:char-shading-value="0" style:font-name-asian="Arial2" style:font-size-asian="11pt" style:font-weight-asian="bold" style:font-name-complex="Arial2" style:font-size-complex="11pt" style:font-weight-complex="bold"/>
    </style:style>
    <style:style style:name="T170" style:family="text">
      <style:text-properties fo:color="#00e676" loext:opacity="100%" style:font-name="Courier New" fo:font-size="10pt" fo:font-weight="bold" fo:background-color="#5d4037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71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72" style:family="text">
      <style:text-properties fo:color="#eeeeee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73" style:family="text">
      <style:text-properties fo:color="#eeeeee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74" style:family="text">
      <style:text-properties fo:color="#ffc400" loext:opacity="100%" style:font-name="Courier New" fo:font-size="10pt" fo:font-weight="bold" fo:background-color="#0000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75" style:family="text">
      <style:text-properties fo:color="#ff5252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76" style:family="text">
      <style:text-properties fo:color="#ff5252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77" style:family="text">
      <style:text-properties fo:color="#c6ff00" loext:opacity="100%" style:font-name="Arial" fo:font-size="10pt" fo:font-weight="bold" fo:background-color="#651fff" loext:char-shading-value="0" style:font-size-asian="10pt" style:font-weight-asian="bold" style:font-name-complex="Arial2" style:font-size-complex="10pt" style:font-weight-complex="bold"/>
    </style:style>
    <style:style style:name="T178" style:family="text">
      <style:text-properties fo:color="#c6ff00" loext:opacity="100%" fo:font-size="10pt" fo:font-weight="bold" fo:background-color="#651fff" loext:char-shading-value="0" style:font-name-asian="Arial2" style:font-size-asian="10pt" style:font-weight-asian="bold" style:font-name-complex="Arial2" style:font-size-complex="10pt" style:font-weight-complex="bold"/>
    </style:style>
    <style:style style:name="T179" style:family="text">
      <style:text-properties fo:color="#f50057" loext:opacity="100%" style:font-name="Arial" fo:font-size="9pt" fo:font-weight="bold" fo:background-color="#ffff00" loext:char-shading-value="0" style:font-size-asian="9pt" style:font-weight-asian="bold" style:font-name-complex="Arial2" style:font-size-complex="9pt" style:font-weight-complex="bold"/>
    </style:style>
    <style:style style:name="T180" style:family="text">
      <style:text-properties fo:color="#f50057" loext:opacity="100%" fo:font-size="9pt" fo:font-weight="bold" fo:background-color="#ffff00" loext:char-shading-value="0" style:font-name-asian="Arial2" style:font-size-asian="9pt" style:font-weight-asian="bold" style:font-name-complex="Arial2" style:font-size-complex="9pt" style:font-weight-complex="bold"/>
    </style:style>
    <style:style style:name="T181" style:family="text">
      <style:text-properties fo:color="#ff91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182" style:family="text">
      <style:text-properties fo:color="#ff9100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83" style:family="text">
      <style:text-properties fo:color="#ff91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184" style:family="text">
      <style:text-properties fo:color="#ff9100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85" style:family="text">
      <style:text-properties fo:color="#b2ff59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86" style:family="text">
      <style:text-properties fo:color="#b2ff59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87" style:family="text">
      <style:text-properties fo:color="#b2ff59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88" style:family="text">
      <style:text-properties fo:color="#ff6e40" loext:opacity="100%" style:font-name="Courier New" fo:font-size="9pt" fo:font-weight="bold" fo:background-color="#3e272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89" style:family="text">
      <style:text-properties fo:color="#d500f9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90" style:family="text">
      <style:text-properties fo:color="#b71c1c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91" style:family="text">
      <style:text-properties fo:color="#c62828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92" style:family="text">
      <style:text-properties fo:color="#c62828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93" style:family="text">
      <style:text-properties fo:color="#c62828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6" loext:marker-style-name="T2"><text:span text:style-name="T1">運算式樹 </text:span><text:span text:style-name="T7">Expression Tree</text:span></text:p>
            <text:p text:style-name="P17" loext:marker-style-name="T10"><text:span text:style-name="T9">資訊類考試完整筆記 </text:span><text:span text:style-name="T11">· </text:span><text:span text:style-name="T9">從零開始到考試必勝</text:span></text:p>
          </table:table-cell>
        </table:table-row>
      </table:table>
      <text:p text:style-name="P1"/>
      <text:h text:style-name="P13" text:outline-level="1" loext:marker-style-name="T13"><text:span text:style-name="T12">第一部分：基本定義</text:span><text:span text:style-name="T13"/></text:h>
      <text:p text:style-name="P2"/>
      <text:h text:style-name="P12" text:outline-level="2" loext:marker-style-name="T30"><text:span text:style-name="T29">什麼是運算式樹 </text:span><text:span text:style-name="T30">(Expression Tree)</text:span><text:span text:style-name="T29">？</text:span></text:h>
      <text:p text:style-name="P25" loext:marker-style-name="T47"><text:span text:style-name="T46">運算式樹是一種特殊的二元樹，用來表示算術或邏輯運算式。它把整個算式的結構以樹狀方式呈現，讓電腦能清楚理解每一個運算的先後順序。</text:span><text:span text:style-name="T47"/></text:p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" loext:marker-style-name="T34"><text:span text:style-name="T33">核心規則（考試必記）</text:span><text:span text:style-name="T34"/></text:p>
            <text:p text:style-name="P5" loext:marker-style-name="T47"><text:span text:style-name="T64">• </text:span><text:span text:style-name="T79">葉節點 </text:span><text:span text:style-name="T80">(Leaf Node)</text:span><text:span text:style-name="T79">：存放 運算元 </text:span><text:span text:style-name="T80">(Operand)</text:span><text:span text:style-name="T46">，例如 </text:span><text:span text:style-name="T64">A</text:span><text:span text:style-name="T46">、</text:span><text:span text:style-name="T64">B</text:span><text:span text:style-name="T46">、</text:span><text:span text:style-name="T64">3</text:span><text:span text:style-name="T46">、</text:span><text:span text:style-name="T64">5</text:span></text:p>
            <text:p text:style-name="P5" loext:marker-style-name="T47"><text:span text:style-name="T64">• </text:span><text:span text:style-name="T81">內部節點 </text:span><text:span text:style-name="T86">(Internal Node)</text:span><text:span text:style-name="T81">：存放 運算子 </text:span><text:span text:style-name="T86">(Operator)</text:span><text:span text:style-name="T46">，例如 </text:span><text:span text:style-name="T64">+</text:span><text:span text:style-name="T46">、</text:span><text:span text:style-name="T64">-</text:span><text:span text:style-name="T46">、</text:span><text:span text:style-name="T64">×</text:span><text:span text:style-name="T46">、</text:span><text:span text:style-name="T64">÷</text:span></text:p>
            <text:p text:style-name="P5" loext:marker-style-name="T47"><text:span text:style-name="T64">•</text:span><text:span text:style-name="T92"> </text:span><text:span text:style-name="T107">通常是 </text:span><text:span text:style-name="T108">Full Binary Tree</text:span><text:span text:style-name="T46">（每個節點恰好有 </text:span><text:span text:style-name="T64">0 </text:span><text:span text:style-name="T46">或 </text:span><text:span text:style-name="T64">2 </text:span><text:span text:style-name="T46">個子節點）</text:span></text:p>
            <text:p text:style-name="P5" loext:marker-style-name="T112"><text:span text:style-name="T109">• </text:span><text:span text:style-name="T111">若允許一元運算子（如 </text:span><text:span text:style-name="T109">sin</text:span><text:span text:style-name="T111">、</text:span><text:span text:style-name="T109">sqrt</text:span><text:span text:style-name="T111">），則不一定是 </text:span><text:span text:style-name="T109">Full Binary Tree</text:span></text:p>
          </table:table-cell>
        </table:table-row>
      </table:table>
      <text:p text:style-name="P6"/>
      <text:h text:style-name="P12" text:outline-level="2" loext:marker-style-name="T30"><text:span text:style-name="T29">範例：</text:span><text:span text:style-name="T30">(A+B)×C </text:span><text:span text:style-name="T29">的運算式樹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8" loext:marker-style-name="T24"><text:span text:style-name="T24"><text:s text:c="7"/>×</text:span><text:span text:style-name="T24"/></text:p>
            <text:p text:style-name="P19" loext:marker-style-name="T25"><text:span text:style-name="T25"><text:s text:c="6"/>/ \</text:span><text:span text:style-name="T25"/></text:p>
            <text:p text:style-name="P19" loext:marker-style-name="T25"><text:span text:style-name="T25"><text:s text:c="25"/>+ <text:s text:c="2"/>C <text:s text:c="3"/>← 葉節點（運算元）</text:span><text:span text:style-name="T25"/></text:p>
            <text:p text:style-name="P20" loext:marker-style-name="T25"><text:span text:style-name="T25"><text:s text:c="4"/>/ \</text:span><text:span text:style-name="T25"/></text:p>
            <text:p text:style-name="P20" loext:marker-style-name="T25"><text:span text:style-name="T25"><text:s text:c="22"/>A <text:s text:c="2"/>B <text:s/>← 葉節點（運算元）</text:span><text:span text:style-name="T25"/></text:p>
            <text:p text:style-name="P7" loext:marker-style-name="T36"><text:span text:style-name="T125">× </text:span><text:span text:style-name="T126">和 </text:span><text:span text:style-name="T125">+ </text:span><text:span text:style-name="T126">是內部節點（運算子）</text:span><text:span text:style-name="T35">；</text:span><text:span text:style-name="T88">A</text:span><text:span text:style-name="T83">、</text:span><text:span text:style-name="T88">B</text:span><text:span text:style-name="T83">、</text:span><text:span text:style-name="T88">C </text:span><text:span text:style-name="T83">是葉節點（運算元）</text:span></text:p>
          </table:table-cell>
        </table:table-row>
      </table:table>
      <text:p text:style-name="P6"/>
      <text:p text:style-name="Standard"/>
      <text:h text:style-name="P14" text:outline-level="1" loext:marker-style-name="T13"><text:span text:style-name="T12">第二部分：三種走訪方式（</text:span><text:span text:style-name="T13">Traversal</text:span><text:span text:style-name="T12">）</text:span></text:h>
      <text:p text:style-name="P2"/>
      <text:p text:style-name="P25" loext:marker-style-name="T47"><text:span text:style-name="T46">這是 </text:span><text:span text:style-name="T64">Expression Tree </text:span><text:span text:style-name="T46">最核心的考點。三種走訪方式，對應三種不同的運算式表示法：</text:span></text:p>
      <text:p text:style-name="P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Standard" loext:marker-style-name="T4"><text:span text:style-name="T3">走訪方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順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對應表示法</text:span><text:span text:style-name="T4"/></text:p>
          </table:table-cell>
          <table:table-cell table:style-name="表格4.A1" office:value-type="string">
            <text:p text:style-name="Standard" loext:marker-style-name="T4"><text:span text:style-name="T3">說明</text:span><text:span text:style-name="T4"/></text:p>
          </table:table-cell>
        </table:table-row>
        <table:table-row table:style-name="表格4.1">
          <table:table-cell table:style-name="表格4.A2" office:value-type="string">
            <text:p text:style-name="Standard" loext:marker-style-name="T132"><text:span text:style-name="T130">Preorder</text:span><text:span text:style-name="T131">（</text:span><text:span text:style-name="T142">前序</text:span><text:span text:style-name="T131">）</text:span></text:p>
          </table:table-cell>
          <table:table-cell table:style-name="表格4.A2" office:value-type="string">
            <text:p text:style-name="Standard" loext:marker-style-name="T145"><text:span text:style-name="T144">根 → 左 → 右</text:span><text:span text:style-name="T145"/></text:p>
          </table:table-cell>
          <table:table-cell table:style-name="表格4.A2" office:value-type="string">
            <text:p text:style-name="Standard" loext:marker-style-name="T132"><text:span text:style-name="T95">Pre</text:span><text:span text:style-name="T130">fix</text:span><text:span text:style-name="T131">（前置表示法）</text:span></text:p>
          </table:table-cell>
          <table:table-cell table:style-name="表格4.A2" office:value-type="string">
            <text:p text:style-name="Standard" loext:marker-style-name="T132"><text:span text:style-name="T131">第一個元素就是根</text:span><text:span text:style-name="T132"/></text:p>
          </table:table-cell>
        </table:table-row>
        <table:table-row table:style-name="表格4.1">
          <table:table-cell table:style-name="表格4.A3" office:value-type="string">
            <text:p text:style-name="Standard" loext:marker-style-name="T116"><text:span text:style-name="T121">Inorder</text:span><text:span text:style-name="T115">（</text:span><text:span text:style-name="T142">中序</text:span><text:span text:style-name="T115">）</text:span></text:p>
          </table:table-cell>
          <table:table-cell table:style-name="表格4.A3" office:value-type="string">
            <text:p text:style-name="Standard" loext:marker-style-name="T155"><text:span text:style-name="T154">左 → 根 → 右</text:span><text:span text:style-name="T155"/></text:p>
          </table:table-cell>
          <table:table-cell table:style-name="表格4.A3" office:value-type="string">
            <text:p text:style-name="Standard" loext:marker-style-name="T116"><text:span text:style-name="T95">In</text:span><text:span text:style-name="T121">fix</text:span><text:span text:style-name="T115">（中置表示法）</text:span></text:p>
          </table:table-cell>
          <table:table-cell table:style-name="表格4.A3" office:value-type="string">
            <text:p text:style-name="P29" loext:marker-style-name="T116"/>
          </table:table-cell>
        </table:table-row>
        <table:table-row table:style-name="表格4.1">
          <table:table-cell table:style-name="表格4.A4" office:value-type="string">
            <text:p text:style-name="Standard" loext:marker-style-name="T36"><text:span text:style-name="T42">Postorder</text:span><text:span text:style-name="T35">（</text:span><text:span text:style-name="T142">後序</text:span><text:span text:style-name="T35">）</text:span></text:p>
          </table:table-cell>
          <table:table-cell table:style-name="表格4.A4" office:value-type="string">
            <text:p text:style-name="Standard" loext:marker-style-name="T98"><text:span text:style-name="T97">左 → 右 → 根</text:span><text:span text:style-name="T98"/></text:p>
          </table:table-cell>
          <table:table-cell table:style-name="表格4.A4" office:value-type="string">
            <text:p text:style-name="Standard" loext:marker-style-name="T36"><text:span text:style-name="T95">Post</text:span><text:span text:style-name="T42">fix</text:span><text:span text:style-name="T35">（後置表示法）</text:span></text:p>
          </table:table-cell>
          <table:table-cell table:style-name="表格4.A4" office:value-type="string">
            <text:p text:style-name="Standard" loext:marker-style-name="T36"><text:span text:style-name="T35">最後才記錄根節點</text:span><text:span text:style-name="T36"/></text:p>
          </table:table-cell>
        </table:table-row>
      </table:table>
      <text:p text:style-name="P6"/>
      <text:h text:style-name="P12" text:outline-level="2" loext:marker-style-name="T30"><text:span text:style-name="T29">記憶口訣（考試當場不忘）</text:span><text:span text:style-name="T30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7" loext:marker-style-name="T134"><text:span text:style-name="T137">Preorder</text:span><text:span text:style-name="T133">（前序）：進房間立刻簽到 → 先記根，再走左右</text:span></text:p>
            <text:p text:style-name="P5" loext:marker-style-name="T114"><text:span text:style-name="T110">Inorder</text:span><text:span text:style-name="T113">（中序）：先進左房間，才簽到，再進右房間</text:span></text:p>
            <text:p text:style-name="P9" loext:marker-style-name="T34"><text:span text:style-name="T44">Postorder</text:span><text:span text:style-name="T33">（後序）：所有房間都查完，最後才簽退 → 根最後記錄</text:span></text:p>
          </table:table-cell>
        </table:table-row>
      </table:table>
      <text:p text:style-name="P6"/>
      <text:h text:style-name="P12" text:outline-level="2" loext:marker-style-name="T30"><text:span text:style-name="T29">重要注意事項：</text:span><text:span text:style-name="T30">Inorder </text:span><text:span text:style-name="T29">與原式的差異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" loext:marker-style-name="T161"><text:span text:style-name="T160">「中序走訪 </text:span><text:span text:style-name="T163">= </text:span><text:span text:style-name="T160">原始算式」這個說法並不完全準確！</text:span></text:p>
            <text:p text:style-name="P5" loext:marker-style-name="T47"><text:span text:style-name="T46">範例：樹的根為 </text:span><text:span text:style-name="T64">×</text:span><text:span text:style-name="T46">，左子樹為 </text:span><text:span text:style-name="T64">(A+B)</text:span><text:span text:style-name="T46">，右子樹為 </text:span><text:span text:style-name="T64">C</text:span></text:p>
            <text:p text:style-name="P5" loext:marker-style-name="T165"><text:span text:style-name="T165">中序走訪結果：A+B×C（少了括號！）</text:span><text:span text:style-name="T165"/></text:p>
            <text:p text:style-name="P9" loext:marker-style-name="T138"><text:span text:style-name="T138">原始算式應為：(A+B)×C（有括號才正確）</text:span><text:span text:style-name="T138"/></text:p>
            <text:p text:style-name="P31" loext:marker-style-name="T47"><text:span text:style-name="T46">結論：</text:span><text:span text:style-name="T101">中序走訪還原原式時，必要時需補上括號</text:span><text:span text:style-name="T46">，考試要特別留意。</text:span></text:p>
          </table:table-cell>
        </table:table-row>
      </table:table>
      <text:p text:style-name="Standard"/>
      <text:h text:style-name="P14" text:outline-level="1" loext:marker-style-name="T13"><text:span text:style-name="T12">第三部分：如何建立 </text:span><text:span text:style-name="T13">Expression Tree</text:span><text:span text:style-name="T12">（從算式長出樹）</text:span></text:h>
      <text:p text:style-name="P2"/>
      <text:p text:style-name="P25" loext:marker-style-name="T47"><text:span text:style-name="T46">核心原則只有一句：</text:span><text:span text:style-name="T47"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 loext:marker-style-name="T19"><text:span text:style-name="T18">「</text:span><text:span text:style-name="T166">找最後執行的運算子</text:span><text:span text:style-name="T18">，</text:span><text:span text:style-name="T85">它就是目前子樹的根節點</text:span><text:span text:style-name="T18">。」</text:span></text:p>
          </table:table-cell>
        </table:table-row>
      </table:table>
      <text:p text:style-name="P6"/>
      <text:h text:style-name="P12" text:outline-level="2" loext:marker-style-name="T30"><text:span text:style-name="T30">112</text:span><text:span text:style-name="T29">題實戰：</text:span><text:span text:style-name="T31">A/B-C+D×E-A×C</text:span><text:span text:style-name="T30"> → </text:span><text:span text:style-name="T29">建樹步驟</text:span></text:h>
      <text:p text:style-name="P25" loext:marker-style-name="T24"><text:span text:style-name="T24">原式：A/B-C+D×E-A×C</text:span><text:span text:style-name="T24"/></text:p>
      <text:p text:style-name="P3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Standard" loext:marker-style-name="T4"><text:span text:style-name="T3">步驟</text:span><text:span text:style-name="T4"/></text:p>
          </table:table-cell>
          <table:table-cell table:style-name="表格8.A1" office:value-type="string">
            <text:p text:style-name="Standard" loext:marker-style-name="T4"><text:span text:style-name="T3">重點問題</text:span><text:span text:style-name="T4"/></text:p>
          </table:table-cell>
          <table:table-cell table:style-name="表格8.A1" office:value-type="string">
            <text:p text:style-name="Standard" loext:marker-style-name="T4"><text:span text:style-name="T3">說明與結果</text:span><text:span text:style-name="T4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3">1</text:span></text:p>
          </table:table-cell>
          <table:table-cell table:style-name="表格8.A2" office:value-type="string">
            <text:p text:style-name="P5" loext:marker-style-name="T53"><text:span text:style-name="T99">找高優先權運算</text:span><text:span text:style-name="T52">（</text:span><text:span text:style-name="T167">乘除先</text:span><text:span text:style-name="T52">）</text:span></text:p>
          </table:table-cell>
          <table:table-cell table:style-name="表格8.A2" office:value-type="string">
            <text:p text:style-name="P5" loext:marker-style-name="T68"><text:span text:style-name="T68">圈出：</text:span><text:span text:style-name="T170">(A/B)</text:span><text:span text:style-name="T68">、</text:span><text:span text:style-name="T170">(D×E)</text:span><text:span text:style-name="T68">、</text:span><text:span text:style-name="T170">(A×C)</text:span></text:p>
            <text:p text:style-name="P5" loext:marker-style-name="T68"><text:span text:style-name="T68">整理：(A/B)-C+(D×E)-(A×C)</text:span><text:span text:style-name="T68"/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3">2</text:span></text:p>
          </table:table-cell>
          <table:table-cell table:style-name="表格8.A3" office:value-type="string">
            <text:p text:style-name="P5" loext:marker-style-name="T147"><text:span text:style-name="T146">找最後執行的運算子</text:span><text:span text:style-name="T147"/></text:p>
          </table:table-cell>
          <table:table-cell table:style-name="表格8.A3" office:value-type="string">
            <text:p text:style-name="P5" loext:marker-style-name="T68"><text:span text:style-name="T68">加減同優先，從左往右：</text:span><text:span text:style-name="T68"/></text:p>
            <text:p text:style-name="P5" loext:marker-style-name="T68"><text:span text:style-name="T68">①(A/B)-C <text:s/>②①+(D×E) <text:s/>③②-(A×C)</text:span><text:span text:style-name="T68"/></text:p>
            <text:p text:style-name="P5" loext:marker-style-name="T89"><text:span text:style-name="T89">最後是 [ - ]，所以樹根 = -</text:span><text:span text:style-name="T89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3">3</text:span></text:p>
          </table:table-cell>
          <table:table-cell table:style-name="表格8.A2" office:value-type="string">
            <text:p text:style-name="P5" loext:marker-style-name="T173"><text:span text:style-name="T172">切左右子樹</text:span><text:span text:style-name="T173"/></text:p>
          </table:table-cell>
          <table:table-cell table:style-name="表格8.A2" office:value-type="string">
            <text:p text:style-name="P5" loext:marker-style-name="T69"><text:span text:style-name="T69">左子樹：((A/B)-C)+(D×E)</text:span><text:span text:style-name="T69"/></text:p>
            <text:p text:style-name="P5" loext:marker-style-name="T69"><text:span text:style-name="T69">右子樹：(A×C)</text:span><text:span text:style-name="T69"/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3">4</text:span></text:p>
          </table:table-cell>
          <table:table-cell table:style-name="表格8.A3" office:value-type="string">
            <text:p text:style-name="P5" loext:marker-style-name="T53"><text:span text:style-name="T52">遞迴處理左子樹</text:span><text:span text:style-name="T53"/></text:p>
          </table:table-cell>
          <table:table-cell table:style-name="表格8.A3" office:value-type="string">
            <text:p text:style-name="P5" loext:marker-style-name="T68"><text:span text:style-name="T174">左子樹最後算 +，再往下拆</text:span><text:span text:style-name="T68">：</text:span></text:p>
            <text:p text:style-name="P5" loext:marker-style-name="T69"><text:span text:style-name="T69">左：(A/B)-C，右：D×E</text:span><text:span text:style-name="T69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3">5</text:span></text:p>
          </table:table-cell>
          <table:table-cell table:style-name="表格8.A2" office:value-type="string">
            <text:p text:style-name="P5" loext:marker-style-name="T53"><text:span text:style-name="T52">遞迴處理 </text:span><text:span text:style-name="T73">(A/B)-C</text:span></text:p>
          </table:table-cell>
          <table:table-cell table:style-name="表格8.A2" office:value-type="string">
            <text:p text:style-name="P5" loext:marker-style-name="T68"><text:span text:style-name="T174">最後算 -</text:span><text:span text:style-name="T68">，</text:span><text:span text:style-name="T69">左：A/B，右：C</text:span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3">6</text:span></text:p>
          </table:table-cell>
          <table:table-cell table:style-name="表格8.A3" office:value-type="string">
            <text:p text:style-name="P5" loext:marker-style-name="T53"><text:span text:style-name="T52">處理 </text:span><text:span text:style-name="T73">A/B</text:span></text:p>
          </table:table-cell>
          <table:table-cell table:style-name="表格8.A3" office:value-type="string">
            <text:p text:style-name="P5" loext:marker-style-name="T68"><text:span text:style-name="T174">最後算 /</text:span><text:span text:style-name="T68">，</text:span><text:span text:style-name="T69">左：A，右：B</text:span></text:p>
          </table:table-cell>
        </table:table-row>
      </table:table>
      <text:p text:style-name="P10"/>
      <text:p text:style-name="P32" loext:marker-style-name="T120"><text:span text:style-name="T123">112</text:span><text:span text:style-name="T119">題完整表達式樹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3" loext:marker-style-name="T26"><text:span text:style-name="T26"><text:s text:c="15"/>- <text:s text:c="9"/>&lt;- 根節點（最後執行）</text:span><text:span text:style-name="T26"/></text:p>
            <text:p text:style-name="P34" loext:marker-style-name="T26"><text:span text:style-name="T26"><text:s text:c="13"/>/ <text:s text:c="2"/>\</text:span><text:span text:style-name="T26"/></text:p>
            <text:p text:style-name="P34" loext:marker-style-name="T26"><text:span text:style-name="T26"><text:s text:c="12"/>+ <text:s text:c="4"/>*</text:span><text:span text:style-name="T26"/></text:p>
            <text:p text:style-name="P34" loext:marker-style-name="T26"><text:span text:style-name="T26"><text:s text:c="11"/>/ \ <text:s text:c="2"/>/ \</text:span><text:span text:style-name="T26"/></text:p>
            <text:p text:style-name="P34" loext:marker-style-name="T26"><text:span text:style-name="T26"><text:s text:c="10"/>- <text:s text:c="2"/>* A <text:s text:c="2"/>C</text:span><text:span text:style-name="T26"/></text:p>
            <text:p text:style-name="P34" loext:marker-style-name="T26"><text:span text:style-name="T26"><text:s text:c="9"/>/ \ / \</text:span><text:span text:style-name="T26"/></text:p>
            <text:p text:style-name="P34" loext:marker-style-name="T26"><text:span text:style-name="T26"><text:s text:c="8"/>/ <text:s/>C D <text:s text:c="2"/>E</text:span><text:span text:style-name="T26"/></text:p>
            <text:p text:style-name="P34" loext:marker-style-name="T26"><text:span text:style-name="T26"><text:s text:c="7"/>/ \</text:span><text:span text:style-name="T26"/></text:p>
            <text:p text:style-name="P35" loext:marker-style-name="T26"><text:span text:style-name="T26"><text:s text:c="6"/>A <text:s text:c="2"/>B</text:span><text:span text:style-name="T26"/></text:p>
          </table:table-cell>
        </table:table-row>
      </table:table>
      <text:p text:style-name="P10"/>
      <text:p text:style-name="P32" loext:marker-style-name="T120"><text:span text:style-name="T123">112</text:span><text:span text:style-name="T119">題答案驗證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"><text:span text:style-name="T133">前序 </text:span><text:span text:style-name="T137">(Preorder)</text:span><text:span text:style-name="T133">：</text:span><text:span text:style-name="T25"> <text:s/>-+-/ABC×DE×AC</text:span></text:p>
            <text:p text:style-name="P5"><text:span text:style-name="T33">後序 </text:span><text:span text:style-name="T44">(Postorder)</text:span><text:span text:style-name="T33">：</text:span><text:span text:style-name="T25"> <text:s/>AB/C-DE×+AC×-</text:span></text:p>
            <text:p text:style-name="P9"><text:span text:style-name="T113">中序 </text:span><text:span text:style-name="T110">(Inorder)</text:span><text:span text:style-name="T113">：</text:span><text:span text:style-name="T25"> <text:s/>A/B-C+D×E-A×C <text:s/>（還原為原始算式）</text:span></text:p>
            <text:p text:style-name="P31" loext:marker-style-name="T55"><text:span text:style-name="T74">★ </text:span><text:span text:style-name="T54">圖片原始標示：前序 </text:span><text:span text:style-name="T74">+-/ABC*DE*AC</text:span><text:span text:style-name="T54">，後序 </text:span><text:span text:style-name="T74">AB/C-DE*+AC*-</text:span><text:span text:style-name="T54">（與上方一致，</text:span><text:span text:style-name="T74">× </text:span><text:span text:style-name="T54">以 </text:span><text:span text:style-name="T74">* </text:span><text:span text:style-name="T54">符號表示）</text:span></text:p>
          </table:table-cell>
        </table:table-row>
      </table:table>
      <text:p text:style-name="Standard"><text:soft-page-break/></text:p>
      <text:h text:style-name="P14" text:outline-level="1" loext:marker-style-name="T13"><text:span text:style-name="T12">第四部分：</text:span><text:span text:style-name="T14">Postfix Stack </text:span><text:span text:style-name="T15">求值</text:span></text:h>
      <text:p text:style-name="P2"/>
      <text:p text:style-name="P25" loext:marker-style-name="T47"><text:span text:style-name="T64">Postfix</text:span><text:span text:style-name="T46">（後置式）最大的優點：</text:span><text:span text:style-name="T48">不需要括號</text:span><text:span text:style-name="T46">，</text:span><text:span text:style-name="T49">不需要考慮優先權</text:span><text:span text:style-name="T46">，</text:span><text:span text:style-name="T101">只要用 </text:span><text:span text:style-name="T93">Stack </text:span><text:span text:style-name="T101">就能計算</text:span><text:span text:style-name="T46">。</text:span></text:p>
      <text:p text:style-name="P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7" loext:marker-style-name="T21"><text:span text:style-name="T28">Postfix Stack </text:span><text:span text:style-name="T20">計算規則</text:span></text:p>
            <text:p text:style-name="P5" loext:marker-style-name="T47"><text:span text:style-name="T64">① </text:span><text:span text:style-name="T48">從左往右讀取每個符號</text:span></text:p>
            <text:p text:style-name="P36" loext:marker-style-name="T47"><text:span text:style-name="T64">② </text:span><text:span text:style-name="T49">看到 運算元（數字</text:span><text:span text:style-name="T65">/</text:span><text:span text:style-name="T49">變數）</text:span><text:span text:style-name="T46">→ </text:span><text:span text:style-name="T102">直接 </text:span><text:span text:style-name="T94">Push </text:span><text:span text:style-name="T102">進 </text:span><text:span text:style-name="T94">Stack</text:span></text:p>
            <text:p text:style-name="P37" loext:marker-style-name="T47"><text:span text:style-name="T64">③ </text:span><text:span text:style-name="T50">看到 運算子（</text:span><text:span text:style-name="T66">+</text:span><text:span text:style-name="T50">、</text:span><text:span text:style-name="T66">-</text:span><text:span text:style-name="T50">、</text:span><text:span text:style-name="T66">×</text:span><text:span text:style-name="T50">、</text:span><text:span text:style-name="T66">÷</text:span><text:span text:style-name="T50">）</text:span><text:span text:style-name="T46">→ </text:span><text:span text:style-name="T86">Pop </text:span><text:span text:style-name="T81">兩個值計算，結果 </text:span><text:span text:style-name="T86">Push </text:span><text:span text:style-name="T81">回 </text:span><text:span text:style-name="T86">Stack</text:span></text:p>
            <text:p text:style-name="P31" loext:marker-style-name="T162"><text:span text:style-name="T164">⚠️ </text:span><text:span text:style-name="T148">重要：</text:span><text:span text:style-name="T150">Pop </text:span><text:span text:style-name="T148">順序是「先 </text:span><text:span text:style-name="T150">Pop </text:span><text:span text:style-name="T148">的是右運算元，後 </text:span><text:span text:style-name="T150">Pop </text:span><text:span text:style-name="T148">的是左運算元」</text:span></text:p>
            <text:p text:style-name="P38" loext:marker-style-name="T55"><text:span text:style-name="T54">例：</text:span><text:span text:style-name="T175">Stack </text:span><text:span text:style-name="T176">由上到下為 </text:span><text:span text:style-name="T175">[5, 2]</text:span><text:span text:style-name="T54">，遇到 </text:span><text:span text:style-name="T74">-</text:span><text:span text:style-name="T54">，計算 </text:span><text:span text:style-name="T74">2 - 5 = -3</text:span><text:span text:style-name="T54">（</text:span><text:span text:style-name="T156">先</text:span><text:span text:style-name="T158">Pop</text:span><text:span text:style-name="T156">的</text:span><text:span text:style-name="T158">5</text:span><text:span text:style-name="T156">是右</text:span><text:span text:style-name="T54">，</text:span><text:span text:style-name="T177">後</text:span><text:span text:style-name="T178">Pop</text:span><text:span text:style-name="T177">的</text:span><text:span text:style-name="T178">2</text:span><text:span text:style-name="T177">是左</text:span><text:span text:style-name="T54">）</text:span></text:p>
          </table:table-cell>
        </table:table-row>
      </table:table>
      <text:p text:style-name="P6"/>
      <text:h text:style-name="P12" text:outline-level="2" loext:marker-style-name="T30"><text:span text:style-name="T30">113</text:span><text:span text:style-name="T29">題實戰：</text:span><text:span text:style-name="T30">36 12 ÷ 10 23 - × 50 40 - +</text:span></text:h>
      <text:p text:style-name="P25" loext:marker-style-name="T34"><text:span text:style-name="T33">答案 </text:span><text:span text:style-name="T44">= -29</text:span></text:p>
      <text:p text:style-name="P3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2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2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①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36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Push 36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[36]</text:span><text:span text:style-name="T60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②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12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Push 12 </text:span><text:span text:style-name="T156">先</text:span><text:span text:style-name="T158">Pop</text:span><text:span text:style-name="T156">的是右</text:span><text:span text:style-name="T61"> </text:span></text:p>
          </table:table-cell>
          <table:table-cell table:style-name="表格12.A3" office:value-type="string">
            <text:p text:style-name="Standard" loext:marker-style-name="T60"><text:span text:style-name="T77">[36, 12]</text:span><text:span text:style-name="T60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③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÷</text:span><text:span text:style-name="T60"/></text:p>
          </table:table-cell>
          <table:table-cell table:style-name="表格12.A2" office:value-type="string">
            <text:p text:style-name="Standard" loext:marker-style-name="T60"><text:span text:style-name="T159">Pop 12</text:span><text:span text:style-name="T77">, Pop 36</text:span><text:span text:style-name="T61">，</text:span><text:span text:style-name="T179">計算 </text:span><text:span text:style-name="T180">36÷</text:span><text:span text:style-name="T159">12</text:span><text:span text:style-name="T180">=3</text:span><text:span text:style-name="T179">，</text:span><text:span text:style-name="T180">Push 3</text:span></text:p>
          </table:table-cell>
          <table:table-cell table:style-name="表格12.A2" office:value-type="string">
            <text:p text:style-name="Standard" loext:marker-style-name="T60"><text:span text:style-name="T77">[3]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36÷12=3</text:span><text:span text:style-name="T60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④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1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Push 1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[3, 10]</text:span><text:span text:style-name="T60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⑤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23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Push 23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[3, 10, 23]</text:span><text:span text:style-name="T60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⑥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-</text:span><text:span text:style-name="T60"/></text:p>
          </table:table-cell>
          <table:table-cell table:style-name="表格12.A3" office:value-type="string">
            <text:p text:style-name="Standard" loext:marker-style-name="T60"><text:span text:style-name="T159">Pop 23</text:span><text:span text:style-name="T77">, Pop 10</text:span><text:span text:style-name="T61">，計算 </text:span><text:span text:style-name="T77">10-</text:span><text:span text:style-name="T159">23</text:span><text:span text:style-name="T77">=-13</text:span><text:span text:style-name="T61">，</text:span><text:span text:style-name="T77">Push -13</text:span></text:p>
          </table:table-cell>
          <table:table-cell table:style-name="表格12.A3" office:value-type="string">
            <text:p text:style-name="Standard" loext:marker-style-name="T60"><text:span text:style-name="T77">[3, -13]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10-23=-13</text:span><text:span text:style-name="T60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⑦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×</text:span><text:span text:style-name="T60"/></text:p>
          </table:table-cell>
          <table:table-cell table:style-name="表格12.A2" office:value-type="string">
            <text:p text:style-name="Standard" loext:marker-style-name="T60"><text:span text:style-name="T159">Pop -13</text:span><text:span text:style-name="T77">, Pop 3</text:span><text:span text:style-name="T61">，計算 </text:span><text:span text:style-name="T77">3×</text:span><text:span text:style-name="T159">(-13)</text:span><text:span text:style-name="T77">=-39</text:span><text:span text:style-name="T61">，</text:span><text:span text:style-name="T77">Push -39</text:span></text:p>
          </table:table-cell>
          <table:table-cell table:style-name="表格12.A2" office:value-type="string">
            <text:p text:style-name="Standard" loext:marker-style-name="T60"><text:span text:style-name="T77">[-39]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3×(-13)=-39</text:span><text:span text:style-name="T60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⑧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5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Push 5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[-39, 50]</text:span><text:span text:style-name="T60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⑨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40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Push 40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[-39, 50, 40]</text:span><text:span text:style-name="T60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⑩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-</text:span><text:span text:style-name="T60"/></text:p>
          </table:table-cell>
          <table:table-cell table:style-name="表格12.A3" office:value-type="string">
            <text:p text:style-name="Standard" loext:marker-style-name="T60"><text:span text:style-name="T159">Pop 40</text:span><text:span text:style-name="T77">, Pop 50</text:span><text:span text:style-name="T61">，計算 </text:span><text:span text:style-name="T77">50-</text:span><text:span text:style-name="T159">40</text:span><text:span text:style-name="T77">=10</text:span><text:span text:style-name="T61">，</text:span><text:span text:style-name="T77">Push 10</text:span></text:p>
          </table:table-cell>
          <table:table-cell table:style-name="表格12.A3" office:value-type="string">
            <text:p text:style-name="Standard" loext:marker-style-name="T60"><text:span text:style-name="T77">[-39, 10]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50-40=10</text:span><text:span text:style-name="T60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⑪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+</text:span><text:span text:style-name="T60"/></text:p>
          </table:table-cell>
          <table:table-cell table:style-name="表格12.A2" office:value-type="string">
            <text:p text:style-name="Standard" loext:marker-style-name="T60"><text:span text:style-name="T159">Pop 10</text:span><text:span text:style-name="T77">, Pop -39</text:span><text:span text:style-name="T61">，計算 </text:span><text:span text:style-name="T77">-39+</text:span><text:span text:style-name="T159">10</text:span><text:span text:style-name="T77">=-29</text:span><text:span text:style-name="T61">，</text:span><text:span text:style-name="T77">Push -29</text:span></text:p>
          </table:table-cell>
          <table:table-cell table:style-name="表格12.A2" office:value-type="string">
            <text:p text:style-name="Standard" loext:marker-style-name="T60"><text:span text:style-name="T77">[-29]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-39+10=-29</text:span><text:span text:style-name="T60"/></text:p>
          </table:table-cell>
        </table:table-row>
        <table:table-row table:style-name="表格12.1">
          <table:table-cell table:style-name="表格12.A13" office:value-type="string">
            <text:p text:style-name="Standard" loext:marker-style-name="T136"><text:span text:style-name="T135">結果</text:span><text:span text:style-name="T136"/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36"><text:span text:style-name="T141">Stack </text:span><text:span text:style-name="T135">剩下 </text:span><text:span text:style-name="T141">-29</text:span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36"><text:span text:style-name="T141">★ </text:span><text:span text:style-name="T135">答案 </text:span><text:span text:style-name="T141">= -29</text:span></text:p>
          </table:table-cell>
        </table:table-row>
      </table:table>
      <text:p text:style-name="P6"/>
      <text:h text:style-name="P12" text:outline-level="2" loext:marker-style-name="T30"><text:span text:style-name="T30">114</text:span><text:span text:style-name="T29">題實戰：</text:span><text:span text:style-name="T30">2 5 × 4 2 + - 6 +</text:span></text:h>
      <text:p text:style-name="P25" loext:marker-style-name="T34"><text:span text:style-name="T33">答案 </text:span><text:span text:style-name="T44">= 10</text:span></text:p>
      <text:p text:style-name="P3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3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3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①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Push 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[2]</text:span><text:span text:style-name="T60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②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5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Push 5 <text:s/></text:span><text:span text:style-name="T83">先</text:span><text:span text:style-name="T88">Pop</text:span><text:span text:style-name="T83">的是右</text:span></text:p>
          </table:table-cell>
          <table:table-cell table:style-name="表格13.A3" office:value-type="string">
            <text:p text:style-name="Standard" loext:marker-style-name="T60"><text:span text:style-name="T77">[2, 5]</text:span><text:span text:style-name="T60"/>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Standard" loext:marker-style-name="T60"><text:span text:style-name="T77">③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×</text:span><text:span text:style-name="T60"/></text:p>
          </table:table-cell>
          <table:table-cell table:style-name="表格13.A2" office:value-type="string">
            <text:p text:style-name="Standard" loext:marker-style-name="T60"><text:span text:style-name="T91">Pop 5</text:span><text:span text:style-name="T77">, Pop 2</text:span><text:span text:style-name="T61">，計算 </text:span><text:span text:style-name="T77">2×</text:span><text:span text:style-name="T91">5</text:span><text:span text:style-name="T77">=10</text:span><text:span text:style-name="T61">，</text:span><text:span text:style-name="T77">Push 10</text:span></text:p>
          </table:table-cell>
          <table:table-cell table:style-name="表格13.A2" office:value-type="string">
            <text:p text:style-name="Standard" loext:marker-style-name="T60"><text:span text:style-name="T77">[10]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2×5=10</text:span><text:span text:style-name="T60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④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4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Push 4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[10, 4]</text:span><text:span text:style-name="T60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⑤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Push 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[10, 4, 2]</text:span><text:span text:style-name="T60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⑥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+</text:span><text:span text:style-name="T60"/></text:p>
          </table:table-cell>
          <table:table-cell table:style-name="表格13.A3" office:value-type="string">
            <text:p text:style-name="Standard" loext:marker-style-name="T60"><text:span text:style-name="T91">Pop 2</text:span><text:span text:style-name="T77">, Pop 4</text:span><text:span text:style-name="T61">，計算 </text:span><text:span text:style-name="T77">4+</text:span><text:span text:style-name="T91">2</text:span><text:span text:style-name="T77">=6</text:span><text:span text:style-name="T61">，</text:span><text:span text:style-name="T77">Push 6</text:span></text:p>
          </table:table-cell>
          <table:table-cell table:style-name="表格13.A3" office:value-type="string">
            <text:p text:style-name="Standard" loext:marker-style-name="T60"><text:span text:style-name="T77">[10, 6]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4+2=6</text:span><text:span text:style-name="T60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⑦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-</text:span><text:span text:style-name="T60"/></text:p>
          </table:table-cell>
          <table:table-cell table:style-name="表格13.A2" office:value-type="string">
            <text:p text:style-name="Standard" loext:marker-style-name="T60"><text:span text:style-name="T91">Pop 6</text:span><text:span text:style-name="T77">, Pop 10</text:span><text:span text:style-name="T61">，計算 </text:span><text:span text:style-name="T77">10-</text:span><text:span text:style-name="T91">6</text:span><text:span text:style-name="T77">=4</text:span><text:span text:style-name="T61">，</text:span><text:span text:style-name="T77">Push 4</text:span></text:p>
          </table:table-cell>
          <table:table-cell table:style-name="表格13.A2" office:value-type="string">
            <text:p text:style-name="Standard" loext:marker-style-name="T60"><text:span text:style-name="T77">[4]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10-6=4</text:span><text:span text:style-name="T60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⑧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6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Push 6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[4, 6]</text:span><text:span text:style-name="T60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⑨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+</text:span><text:span text:style-name="T60"/></text:p>
          </table:table-cell>
          <table:table-cell table:style-name="表格13.A2" office:value-type="string">
            <text:p text:style-name="Standard" loext:marker-style-name="T60"><text:span text:style-name="T91">Pop</text:span><text:span text:style-name="T77"> 6, Pop 4</text:span><text:span text:style-name="T61">，計算 </text:span><text:span text:style-name="T77">4+</text:span><text:span text:style-name="T91">6</text:span><text:span text:style-name="T77">=10</text:span><text:span text:style-name="T61">，</text:span><text:span text:style-name="T77">Push 10</text:span></text:p>
          </table:table-cell>
          <table:table-cell table:style-name="表格13.A2" office:value-type="string">
            <text:p text:style-name="Standard" loext:marker-style-name="T60"><text:span text:style-name="T77">[10]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4+6=10</text:span><text:span text:style-name="T60"/></text:p>
          </table:table-cell>
        </table:table-row>
        <table:table-row table:style-name="表格13.1">
          <table:table-cell table:style-name="表格13.A11" office:value-type="string">
            <text:p text:style-name="Standard" loext:marker-style-name="T136"><text:span text:style-name="T135">結果</text:span><text:span text:style-name="T136"/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36"><text:span text:style-name="T141">Stack </text:span><text:span text:style-name="T135">剩下 </text:span><text:span text:style-name="T141">10</text:span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36"><text:span text:style-name="T141">★ </text:span><text:span text:style-name="T135">答案 </text:span><text:span text:style-name="T141">= 10</text:span></text:p>
          </table:table-cell>
        </table:table-row>
      </table:table>
      <text:p text:style-name="Standard"/>
      <text:h text:style-name="P14" text:outline-level="1" loext:marker-style-name="T13"><text:span text:style-name="T12">第五部分：大範例完整解析（答案 </text:span><text:span text:style-name="T13">198</text:span><text:span text:style-name="T12">）</text:span></text:h>
      <text:p text:style-name="P2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" loext:marker-style-name="T24"><text:span text:style-name="T24">算式：((6×(5-3))-(1+2))×(((4+2)÷3)+(5×4))</text:span><text:span text:style-name="T24"/></text:p>
          </table:table-cell>
        </table:table-row>
      </table:table>
      <text:p text:style-name="P8"/>
      <text:h text:style-name="P12" text:outline-level="2" loext:marker-style-name="T30"><text:span text:style-name="T29">建樹（一步一步拆解）</text:span><text:span text:style-name="T30"/></text:h>
      <text:p text:style-name="P4"><text:span text:style-name="T33">步驟 </text:span><text:span text:style-name="T44">1</text:span><text:span text:style-name="T33">：</text:span><text:span text:style-name="T48">最外層最後算</text:span><text:span text:style-name="T46">：</text:span><text:span text:style-name="T65">× <text:s/>→ <text:s/></text:span><text:span text:style-name="T49">根節點 </text:span><text:span text:style-name="T65">= ×</text:span></text:p>
      <text:p text:style-name="P4"><text:span text:style-name="T33">步驟 </text:span><text:span text:style-name="T44">2</text:span><text:span text:style-name="T33">：</text:span><text:span text:style-name="T46">左子樹：</text:span><text:span text:style-name="T64">((6×(5-3))-(1+2))</text:span><text:span text:style-name="T46">，</text:span><text:span text:style-name="T48">最後算 </text:span><text:span text:style-name="T67">-</text:span></text:p>
      <text:p text:style-name="P4"><text:span text:style-name="T33">步驟 </text:span><text:span text:style-name="T44">3</text:span><text:span text:style-name="T33">：</text:span><text:span text:style-name="T46">左子樹左邊：</text:span><text:span text:style-name="T64">6×(5-3)</text:span><text:span text:style-name="T46">，</text:span><text:span text:style-name="T48">最後算 </text:span><text:span text:style-name="T67">×</text:span></text:p>
      <text:p text:style-name="P4"><text:span text:style-name="T33">步驟 </text:span><text:span text:style-name="T44">4</text:span><text:span text:style-name="T33">：</text:span><text:span text:style-name="T46">再拆：</text:span><text:span text:style-name="T64">5-3 </text:span><text:span text:style-name="T48">最後算 </text:span><text:span text:style-name="T67">-</text:span><text:span text:style-name="T46">，葉節點 </text:span><text:span text:style-name="T64">5 </text:span><text:span text:style-name="T46">和 </text:span><text:span text:style-name="T64">3</text:span></text:p>
      <text:p text:style-name="P4"><text:span text:style-name="T33">步驟 </text:span><text:span text:style-name="T44">5</text:span><text:span text:style-name="T33">：</text:span><text:span text:style-name="T46">左子樹右邊：</text:span><text:span text:style-name="T64">1+2</text:span><text:span text:style-name="T46">，葉節點 </text:span><text:span text:style-name="T64">1 </text:span><text:span text:style-name="T46">和 </text:span><text:span text:style-name="T64">2</text:span></text:p>
      <text:p text:style-name="P4"><text:span text:style-name="T33">步驟 </text:span><text:span text:style-name="T44">6</text:span><text:span text:style-name="T33">：</text:span><text:span text:style-name="T46">右子樹：</text:span><text:span text:style-name="T64">((4+2)÷3)+(5×4)</text:span><text:span text:style-name="T46">，</text:span><text:span text:style-name="T48">最後算 </text:span><text:span text:style-name="T67">+</text:span></text:p>
      <text:p text:style-name="P4"><text:span text:style-name="T33">步驟 </text:span><text:span text:style-name="T44">7</text:span><text:span text:style-name="T33">：</text:span><text:span text:style-name="T46">右子樹左邊：</text:span><text:span text:style-name="T64">(4+2)÷3</text:span><text:span text:style-name="T46">，</text:span><text:span text:style-name="T48">最後算 </text:span><text:span text:style-name="T67">÷</text:span></text:p>
      <text:p text:style-name="P4"><text:span text:style-name="T33">步驟 </text:span><text:span text:style-name="T44">8</text:span><text:span text:style-name="T33">：</text:span><text:span text:style-name="T46">再拆：</text:span><text:span text:style-name="T64">4+2</text:span><text:span text:style-name="T46">，葉節點 </text:span><text:span text:style-name="T64">4 </text:span><text:span text:style-name="T46">和 </text:span><text:span text:style-name="T64">2</text:span></text:p>
      <text:p text:style-name="P4"><text:span text:style-name="T33">步驟 </text:span><text:span text:style-name="T44">9</text:span><text:span text:style-name="T33">：</text:span><text:span text:style-name="T46">右子樹右邊：</text:span><text:span text:style-name="T64">5×4</text:span><text:span text:style-name="T46">，葉節點 </text:span><text:span text:style-name="T64">5 </text:span><text:span text:style-name="T46">和 </text:span><text:span text:style-name="T64">4</text:span></text:p>
      <text:p text:style-name="P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2" loext:marker-style-name="T34"><text:span text:style-name="T33">完整表達式樹</text:span><text:span text:style-name="T34"/></text:p>
            <text:p text:style-name="P39" loext:marker-style-name="T27"><text:span text:style-name="T27"><text:s text:c="19"/>* <text:s text:c="30"/>&lt;- 根節點</text:span><text:span text:style-name="T27"/></text:p>
            <text:p text:style-name="P34" loext:marker-style-name="T27"><text:span text:style-name="T27"><text:s text:c="17"/>/ <text:s text:c="2"/>\</text:span><text:span text:style-name="T27"/></text:p>
            <text:p text:style-name="P34" loext:marker-style-name="T27"><text:span text:style-name="T27"><text:s text:c="10"/>- <text:s text:c="16"/>+</text:span><text:span text:style-name="T27"/></text:p>
            <text:p text:style-name="P34" loext:marker-style-name="T27"><text:span text:style-name="T27"><text:s text:c="8"/>/ <text:s text:c="2"/>\ <text:s text:c="12"/>/ <text:s text:c="2"/>\</text:span><text:span text:style-name="T27"/></text:p>
            <text:p text:style-name="P34" loext:marker-style-name="T27"><text:span text:style-name="T27"><text:s text:c="5"/>* <text:s text:c="8"/>+ <text:s text:c="6"/>/ <text:s text:c="8"/>*</text:span><text:span text:style-name="T27"/></text:p>
            <text:p text:style-name="P34" loext:marker-style-name="T27"><text:span text:style-name="T27"><text:s text:c="3"/>/ <text:s text:c="2"/>\ <text:s text:c="4"/>/ <text:s text:c="2"/>\ <text:s text:c="2"/>/ <text:s text:c="2"/>\ <text:s text:c="4"/>/ <text:s text:c="2"/>\</text:span><text:span text:style-name="T27"/></text:p>
            <text:p text:style-name="P35" loext:marker-style-name="T27"><text:span text:style-name="T27"><text:s text:c="2"/>6 <text:s text:c="4"/>- <text:s text:c="2"/>1 <text:s text:c="4"/>2 + <text:s text:c="4"/>3 <text:s text:c="2"/>5 <text:s text:c="4"/>4</text:span><text:span text:style-name="T27"/></text:p>
            <text:p text:style-name="P35" loext:marker-style-name="T27"><text:span text:style-name="T27"><text:s text:c="6"/>/ <text:s text:c="2"/>\ <text:s text:c="6"/>/ <text:s text:c="2"/>\</text:span><text:span text:style-name="T27"/></text:p>
            <text:p text:style-name="P35" loext:marker-style-name="T27"><text:span text:style-name="T27"><text:s text:c="5"/>5 <text:s text:c="4"/>3 <text:s text:c="4"/>4 <text:s text:c="4"/>2</text:span><text:span text:style-name="T27"/></text:p>
          </table:table-cell>
        </table:table-row>
      </table:table>
      <text:p text:style-name="P10"/>
      <text:h text:style-name="P12" text:outline-level="2" loext:marker-style-name="T30"><text:span text:style-name="T30">Postorder </text:span><text:span text:style-name="T29">求值（</text:span><text:span text:style-name="T30">Bottom-Up</text:span><text:span text:style-name="T29">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Standard" loext:marker-style-name="T4"><text:span text:style-name="T3">步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計算內容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結果</text:span><text:span text:style-name="T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①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5-3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2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②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6×2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= 12</text:span><text:span text:style-name="T53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③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1+2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3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④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12-3</text:span><text:span text:style-name="T52">（左子樹完成）</text:span></text:p>
          </table:table-cell>
          <table:table-cell table:style-name="表格16.A3" office:value-type="string">
            <text:p text:style-name="Standard" loext:marker-style-name="T56"><text:span text:style-name="T75">= 9</text:span><text:span text:style-name="T56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⑤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4+2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6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⑥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6÷3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= 2</text:span><text:span text:style-name="T53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⑦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5×4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20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⑧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2+20</text:span><text:span text:style-name="T52">（右子樹完成）</text:span></text:p>
          </table:table-cell>
          <table:table-cell table:style-name="表格16.A3" office:value-type="string">
            <text:p text:style-name="Standard" loext:marker-style-name="T56"><text:span text:style-name="T75">= 22</text:span><text:span text:style-name="T56"/></text:p>
          </table:table-cell>
        </table:table-row>
        <table:table-row table:style-name="表格16.1">
          <table:table-cell table:style-name="表格16.A10" office:value-type="string">
            <text:p text:style-name="Standard" loext:marker-style-name="T117"><text:span text:style-name="T122">⑨</text:span><text:span text:style-name="T117"/></text:p>
          </table:table-cell>
          <table:table-cell table:style-name="表格16.A10" office:value-type="string">
            <text:p text:style-name="Standard" loext:marker-style-name="T117"><text:span text:style-name="T122">9×22</text:span><text:span text:style-name="T118">（根節點）</text:span></text:p>
          </table:table-cell>
          <table:table-cell table:style-name="表格16.A10" office:value-type="string">
            <text:p text:style-name="Standard" loext:marker-style-name="T117"><text:span text:style-name="T122">= 198 ★</text:span><text:span text:style-name="T117"/></text:p>
          </table:table-cell>
        </table:table-row>
      </table:table>
      <text:p text:style-name="P10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7" loext:marker-style-name="T21"><text:span text:style-name="T20">為什麼用 </text:span><text:span text:style-name="T28">Postorder</text:span><text:span text:style-name="T20">？這個範例完美說明了一條鏈：</text:span></text:p>
            <text:p text:style-name="P23" loext:marker-style-name="T34"><text:span text:style-name="T44">Expression Tree <text:s/>→ <text:s/>Postorder </text:span><text:span text:style-name="T33">走訪 <text:s/>→ <text:s/></text:span><text:span text:style-name="T44">Postfix </text:span><text:span text:style-name="T33">算式 <text:s/>→ <text:s/></text:span><text:span text:style-name="T44">Stack </text:span><text:span text:style-name="T33">求值 <text:s/>→ <text:s/>答案 </text:span><text:span text:style-name="T44">198</text:span></text:p>
          </table:table-cell>
        </table:table-row>
      </table:table>
      <text:p text:style-name="Standard"/>
      <text:h text:style-name="P14" text:outline-level="1" loext:marker-style-name="T13"><text:span text:style-name="T12">第六部分：</text:span><text:span text:style-name="T14">Infix </text:span><text:span text:style-name="T15">轉 </text:span><text:span text:style-name="T14">Postfix</text:span><text:span text:style-name="T12">（超高頻考題）</text:span></text:h>
      <text:p text:style-name="P2"/>
      <text:p text:style-name="P25" loext:marker-style-name="T47"><text:span text:style-name="T46">這是資訊類考試最常考的題型之一，必須熟練。</text:span><text:span text:style-name="T47"/></text:p>
      <text:p text:style-name="P8"/>
      <text:h text:style-name="P12" text:outline-level="2" loext:marker-style-name="T30"><text:span text:style-name="T29">優先權表（考前必背）</text:span><text:span text:style-name="T30"/>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Standard" loext:marker-style-name="T4"><text:span text:style-name="T3">運算子</text:span><text:span text:style-name="T4"/></text:p>
          </table:table-cell>
          <table:table-cell table:style-name="表格18.A1" office:value-type="string">
            <text:p text:style-name="Standard" loext:marker-style-name="T4"><text:span text:style-name="T3">優先權（數字越大越高）</text:span><text:span text:style-name="T4"/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56"><text:span text:style-name="T75">× <text:s/>÷</text:span><text:span text:style-name="T57">（乘、除）</text:span></text:p>
          </table:table-cell>
          <table:table-cell table:style-name="表格18.A2" office:value-type="string">
            <text:p text:style-name="Standard" loext:marker-style-name="T100"><text:span text:style-name="T99">優先權 </text:span><text:span text:style-name="T96">2</text:span><text:span text:style-name="T99">（高）</text:span></text:p>
          </table:table-cell>
        </table:table-row>
        <table:table-row table:style-name="表格18.1">
          <table:table-cell table:style-name="表格18.A3" office:value-type="string">
            <text:p text:style-name="Standard" loext:marker-style-name="T59"><text:span text:style-name="T76">+ -</text:span><text:span text:style-name="T58">（加、減）</text:span></text:p>
          </table:table-cell>
          <table:table-cell table:style-name="表格18.A3" office:value-type="string">
            <text:p text:style-name="Standard" loext:marker-style-name="T157"><text:span text:style-name="T156">優先權 </text:span><text:span text:style-name="T158">1</text:span><text:span text:style-name="T156">（低）</text:span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84"><text:span text:style-name="T83">（ <text:s/>）（括號）</text:span><text:span text:style-name="T84"/></text:p>
          </table:table-cell>
          <table:table-cell table:style-name="表格18.A2" office:value-type="string">
            <text:p text:style-name="Standard" loext:marker-style-name="T84"><text:span text:style-name="T83">特殊處理（見規則）</text:span><text:span text:style-name="T84"/></text:p>
          </table:table-cell>
        </table:table-row>
      </table:table>
      <text:p text:style-name="P10"/>
      <text:h text:style-name="P12" text:outline-level="2" loext:marker-style-name="T30"><text:span text:style-name="T29">演算法步驟（</text:span><text:span text:style-name="T30">5</text:span><text:span text:style-name="T29">條規則）</text:span>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7" loext:marker-style-name="T47"><text:span text:style-name="T46">規則 </text:span><text:span text:style-name="T64">1</text:span><text:span text:style-name="T46">：</text:span><text:span text:style-name="T48">遇到 運算元（</text:span><text:span text:style-name="T67">A</text:span><text:span text:style-name="T48">、</text:span><text:span text:style-name="T67">B</text:span><text:span text:style-name="T48">、</text:span><text:span text:style-name="T67">1</text:span><text:span text:style-name="T48">、</text:span><text:span text:style-name="T67">2 </text:span><text:span text:style-name="T48">等）</text:span><text:span text:style-name="T46">→ </text:span><text:span text:style-name="T168">直接輸出到結果</text:span></text:p>
            <text:p text:style-name="P38" loext:marker-style-name="T47"><text:span text:style-name="T46">規則 </text:span><text:span text:style-name="T64">2</text:span><text:span text:style-name="T46">：</text:span><text:span text:style-name="T82">遇到 左括號 </text:span><text:span text:style-name="T87">(</text:span><text:span text:style-name="T64"> → </text:span><text:span text:style-name="T46">直接 </text:span><text:span text:style-name="T64">Push </text:span><text:span text:style-name="T46">進 </text:span><text:span text:style-name="T64">Stack</text:span></text:p>
            <text:p text:style-name="P38" loext:marker-style-name="T47"><text:span text:style-name="T46">規則 </text:span><text:span text:style-name="T64">3</text:span><text:span text:style-name="T46">：</text:span><text:span text:style-name="T181">遇到 右括號 </text:span><text:span text:style-name="T183">)</text:span><text:span text:style-name="T64"> → </text:span><text:span text:style-name="T101">持續 </text:span><text:span text:style-name="T93">Pop </text:span><text:span text:style-name="T101">並輸出</text:span><text:span text:style-name="T46">，</text:span><text:span text:style-name="T185">直到遇見左括號 </text:span><text:span text:style-name="T186">( </text:span><text:span text:style-name="T185">為止</text:span><text:span text:style-name="T46">（</text:span><text:span text:style-name="T143">括號本身不輸出</text:span><text:span text:style-name="T46">）</text:span></text:p>
            <text:p text:style-name="P38" loext:marker-style-name="T47"><text:span text:style-name="T46">規則 </text:span><text:span text:style-name="T64">4</text:span><text:span text:style-name="T46">：</text:span><text:span text:style-name="T49">遇到 運算子（</text:span><text:span text:style-name="T65">+</text:span><text:span text:style-name="T49">、</text:span><text:span text:style-name="T65">-</text:span><text:span text:style-name="T49">、</text:span><text:span text:style-name="T65">×</text:span><text:span text:style-name="T49">、</text:span><text:span text:style-name="T65">÷</text:span><text:span text:style-name="T49">）</text:span><text:span text:style-name="T46">→ </text:span><text:span text:style-name="T81">若 </text:span><text:span text:style-name="T86">Stack </text:span><text:span text:style-name="T81">頂端運算子優先權 ≥ 目前運算子</text:span><text:span text:style-name="T46">，</text:span><text:span text:style-name="T101">先 </text:span><text:span text:style-name="T93">Pop </text:span><text:span text:style-name="T101">再 </text:span><text:span text:style-name="T93">Push</text:span><text:span text:style-name="T101">；否則直接 </text:span><text:span text:style-name="T93">Push</text:span><text:span text:style-name="T184">(</text:span><text:span text:style-name="T182">當看到新的運算子時：如果 </text:span><text:span text:style-name="T184">Stack </text:span><text:span text:style-name="T182">裡面的運算子比它更早算就：先拿</text:span><text:span text:style-name="T184">Stack </text:span><text:span text:style-name="T182">裡面的運算子來輸出</text:span><text:span text:style-name="T184">)</text:span></text:p>
            <text:p text:style-name="P37" loext:marker-style-name="T47"><text:span text:style-name="T46">規則 </text:span><text:span text:style-name="T64">5</text:span><text:span text:style-name="T46">：</text:span><text:span text:style-name="T48">讀取結束 </text:span><text:span text:style-name="T46">→ </text:span><text:span text:style-name="T168">把 </text:span><text:span text:style-name="T169">Stack </text:span><text:span text:style-name="T168">剩餘的所有運算子全部 </text:span><text:span text:style-name="T169">Pop </text:span><text:span text:style-name="T168">並輸出</text:span></text:p>
          </table:table-cell>
        </table:table-row>
      </table:table>
      <text:p text:style-name="P10"/>
      <text:h text:style-name="P12" text:outline-level="2" loext:marker-style-name="T30"><text:span text:style-name="T30">5 </text:span><text:span text:style-name="T29">道練習題完整解析</text:span></text:h>
      <text:p text:style-name="P32" loext:marker-style-name="T120"><text:span text:style-name="T119">題目 </text:span><text:span text:style-name="T123">1</text:span><text:span text:style-name="T119">：</text:span><text:span text:style-name="T124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0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0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1">+ *</text:span><text:span text:style-name="T70"> <text:s text:c="4"/>(</text:span><text:span text:style-name="T90">* &gt; +，直接放入</text:span><text:span text:style-name="T70">)</text:span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+ *</text:span><text:span text:style-name="T70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ABC</text:span><text:span text:style-name="T103">*+</text:span></text:p>
          </table:table-cell>
          <table:table-cell table:style-name="表格20.A3" office:value-type="string">
            <text:p text:style-name="Standard" loext:marker-style-name="T70"><text:span text:style-name="T70">（全部 </text:span><text:span text:style-name="T187">Pop：先 *，再 +</text:span><text:span text:style-name="T70">）</text:span>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5" loext:marker-style-name="T139"><text:span text:style-name="T139">★ 答案：</text:span><text:span text:style-name="T152">ABC*+</text:span></text:p>
          </table:table-cell>
          <table:covered-table-cell/>
          <table:covered-table-cell/>
        </table:table-row>
      </table:table>
      <text:p text:style-name="P8"/>
      <text:p text:style-name="P32" loext:marker-style-name="T120"><text:span text:style-name="T119">題目 </text:span><text:span text:style-name="T123">2</text:span><text:span text:style-name="T119">：</text:span><text:span text:style-name="T124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1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1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（空）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(</text:span><text:span text:style-name="T70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(</text:span><text:span text:style-name="T70"/></text:p>
          </table:table-cell>
        </table:table-row>
        <text:soft-page-break/>
        <table:table-row table:style-name="表格21.1">
          <table:table-cell table:style-name="表格21.A2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1.A2" office:value-type="string">
            <text:p text:style-name="Standard" loext:marker-style-name="T71"><text:span text:style-name="T71">( +</text:span><text:span text:style-name="T71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( +</text:span><text:span text:style-name="T70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AB</text:span><text:span text:style-name="T72">+</text:span></text:p>
          </table:table-cell>
          <table:table-cell table:style-name="表格21.A2" office:value-type="string">
            <text:p text:style-name="Standard" loext:marker-style-name="T90"><text:span text:style-name="T90">（空） <text:s/>← Pop 到 ( 為止</text:span><text:span text:style-name="T90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B</text:span><text:span text:style-name="T72">+</text:span></text:p>
          </table:table-cell>
          <table:table-cell table:style-name="表格21.A3" office:value-type="string">
            <text:p text:style-name="Standard" loext:marker-style-name="T70"><text:span text:style-name="T70">*</text:span><text:span text:style-name="T70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AB+C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*</text:span><text:span text:style-name="T70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B+C*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（Pop *）</text:span><text:span text:style-name="T70"/>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5" loext:marker-style-name="T139"><text:span text:style-name="T139">★ 答案：AB+C*</text:span><text:span text:style-name="T139"/></text:p>
          </table:table-cell>
          <table:covered-table-cell/>
          <table:covered-table-cell/>
        </table:table-row>
      </table:table>
      <text:p text:style-name="P8"/>
      <text:p text:style-name="P32" loext:marker-style-name="T120"><text:span text:style-name="T119">題目 </text:span><text:span text:style-name="T123">3</text:span><text:span text:style-name="T119">：</text:span><text:span text:style-name="T124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2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2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1">+ * </text:span><text:span text:style-name="T70"><text:s/>（</text:span><text:span text:style-name="T90">* &gt; +，直接放</text:span><text:span text:style-name="T70">）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2.A2" office:value-type="string">
            <text:p text:style-name="Standard" loext:marker-style-name="T71"><text:span text:style-name="T71">+ *</text:span><text:span text:style-name="T71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-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BC*+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- <text:s/>（</text:span><text:span text:style-name="T171">- ≤ *，先 Pop *</text:span><text:span text:style-name="T70">；</text:span><text:span text:style-name="T104">- ≤ +，再 Pop +</text:span><text:span text:style-name="T70">；</text:span><text:span text:style-name="T188">最後 Push -</text:span><text:span text:style-name="T70">）(</text:span><text:span text:style-name="T103">當看到新的運算子時：如果 Stack 裡面的運算子比它更早算就：先拿出來輸出</text:span><text:span text:style-name="T70">)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D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BC*+D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-</text:span><text:span text:style-name="T70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BC*+D-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（Pop -）</text:span><text:span text:style-name="T70"/>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5" loext:marker-style-name="T139"><text:span text:style-name="T139">★ 答案：ABC*+D-</text:span><text:span text:style-name="T139"/></text:p>
          </table:table-cell>
          <table:covered-table-cell/>
          <table:covered-table-cell/>
        </table:table-row>
      </table:table>
      <text:p text:style-name="P8"/>
      <text:p text:style-name="P32" loext:marker-style-name="T120"><text:span text:style-name="T119">題目 </text:span><text:span text:style-name="T123">4</text:span><text:span text:style-name="T119">：</text:span><text:span text:style-name="T124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3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3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（空）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(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(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( +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( +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*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* (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C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* (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-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C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* ( - <text:s/></text:span><text:span text:style-name="T128">注意此處：Stack 頂端根本不是 *</text:span><text:span text:style-name="T189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D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CD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* ( -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CD-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2">* </text:span><text:span text:style-name="T70"><text:s text:c="2"/>← </text:span><text:span text:style-name="T190">Pop 到 (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CD-*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（Pop *）</text:span><text:span text:style-name="T70"/>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5" loext:marker-style-name="T139"><text:span text:style-name="T139">★ 答案：AB+CD-*</text:span><text:span text:style-name="T139"/></text:p>
          </table:table-cell>
          <table:covered-table-cell/>
          <table:covered-table-cell/>
        </table:table-row>
      </table:table>
      <text:p text:style-name="P8"/>
      <text:p text:style-name="P32" loext:marker-style-name="T120"><text:span text:style-name="T119">題目 </text:span><text:span text:style-name="T123">5</text:span><text:span text:style-name="T119">：</text:span><text:span text:style-name="T124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4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4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 * <text:s/>（</text:span><text:span text:style-name="T90">* &gt; +，直接放</text:span><text:span text:style-name="T70">）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* (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 * (</text:span><text:span text:style-name="T70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-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* ( -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D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D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 * ( -</text:span><text:span text:style-name="T70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CD-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* <text:s text:c="2"/>←</text:span><text:span text:style-name="T190"> Pop 到 (</text:span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/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D-*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讀到 / </text:span><text:span text:style-name="T71">此時 Stack頂端是 *</text:span><text:span text:style-name="T70"><text:line-break/><text:line-break/></text:span><text:span text:style-name="T153">/ 與 * 同優先權 → 先 Pop *</text:span><text:span text:style-name="T70"><text:line-break/><text:line-break/></text:span><text:span text:style-name="T105">此時新的 Stack頂端變成 +</text:span><text:span text:style-name="T70"><text:line-break/><text:line-break/></text:span><text:span text:style-name="T103">/ 的優先權高於 + → Push /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E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CD-*E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/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D-*E/+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（Pop /，再 Pop +）</text:span><text:span text:style-name="T70"/>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5" loext:marker-style-name="T139"><text:span text:style-name="T139">★ 答案：ABCD-*E/+</text:span><text:span text:style-name="T139"/></text:p>
          </table:table-cell>
          <table:covered-table-cell/>
          <table:covered-table-cell/>
        </table:table-row>
      </table:table>
      <text:p text:style-name="P10"/>
      <text:h text:style-name="P12" text:outline-level="2" loext:marker-style-name="T30"><text:span text:style-name="T29">常見陷阱：</text:span><text:span text:style-name="T32">同優先權的左結合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" loext:marker-style-name="T24"><text:span text:style-name="T24">題目：A-B+C</text:span><text:span text:style-name="T24"/></text:p>
            <text:p text:style-name="P39" loext:marker-style-name="T165"><text:span text:style-name="T165">❌ 錯誤答案：ABC+-</text:span><text:span text:style-name="T165"/></text:p>
            <text:p text:style-name="P38" loext:marker-style-name="T138"><text:span text:style-name="T138">✅ </text:span><text:span text:style-name="T140">正確答案：AB-C+</text:span></text:p>
            <text:p text:style-name="P9" loext:marker-style-name="T47"><text:span text:style-name="T46">原因：</text:span><text:span text:style-name="T64">+ </text:span><text:span text:style-name="T46">和 </text:span><text:span text:style-name="T64">- </text:span><text:span text:style-name="T46">優先權相同，採左結合，計算順序為 </text:span><text:span text:style-name="T64">(A-B)+C</text:span><text:span text:style-name="T46">。 </text:span><text:span text:style-name="T81">遇到 </text:span><text:span text:style-name="T86">+ </text:span><text:span text:style-name="T81">時，</text:span><text:span text:style-name="T86">Stack </text:span><text:span text:style-name="T81">頂端是 </text:span><text:span text:style-name="T86">-</text:span><text:span text:style-name="T81">，兩者優先權相同</text:span><text:span text:style-name="T46">，</text:span><text:span text:style-name="T185">必須先 </text:span><text:span text:style-name="T186">Pop -</text:span><text:span text:style-name="T185">，再 </text:span><text:span text:style-name="T186">Push +</text:span><text:span text:style-name="T46">。</text:span></text:p>
          </table:table-cell>
        </table:table-row>
      </table:table>
      <text:p text:style-name="Standard"/>
      <text:h text:style-name="P14" text:outline-level="1" loext:marker-style-name="T13"><text:span text:style-name="T12">第七部分：</text:span><text:span text:style-name="T14">Prefix </text:span><text:span text:style-name="T15">求值</text:span><text:span text:style-name="T12"> 與</text:span><text:span text:style-name="T16"> </text:span><text:span text:style-name="T17">Postfix ↔ Tree </text:span><text:span text:style-name="T16">互轉</text:span></text:h>
      <text:p text:style-name="P2"/>
      <text:h text:style-name="P12" text:outline-level="2" loext:marker-style-name="T30"><text:span text:style-name="T30">Prefix Stack </text:span><text:span text:style-name="T29">求值</text:span></text:h>
      <text:p text:style-name="P25" loext:marker-style-name="T47"><text:span text:style-name="T151">Prefix</text:span><text:span text:style-name="T149">（前置式）與 </text:span><text:span text:style-name="T151">Postfix </text:span><text:span text:style-name="T149">的差別在於讀取方向</text:span><text:span text:style-name="T46">：</text:span><text:span text:style-name="T129">Postfix </text:span><text:span text:style-name="T127">從左往右，</text:span><text:span text:style-name="T129">Prefix </text:span><text:span text:style-name="T127">從右往左</text:span><text:span text:style-name="T46">。</text:span></text:p>
      <text:p text:style-name="P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 loext:marker-style-name="T21"><text:span text:style-name="T28">Prefix Stack </text:span><text:span text:style-name="T20">計算規則</text:span></text:p>
            <text:p text:style-name="P39" loext:marker-style-name="T47"><text:span text:style-name="T64">① </text:span><text:span text:style-name="T101">從右往左讀取每個符號</text:span></text:p>
            <text:p text:style-name="P36" loext:marker-style-name="T47"><text:span text:style-name="T64">② </text:span><text:span text:style-name="T48">看到 運算元 </text:span><text:span text:style-name="T46">→ </text:span><text:span text:style-name="T94">Push </text:span><text:span text:style-name="T102">進 </text:span><text:span text:style-name="T94">Stack</text:span></text:p>
            <text:p text:style-name="P37" loext:marker-style-name="T47"><text:span text:style-name="T64">③ </text:span><text:span text:style-name="T51">看到 運算子</text:span><text:span text:style-name="T46"> → </text:span><text:span text:style-name="T86">Pop </text:span><text:span text:style-name="T81">兩個值，計算（先 </text:span><text:span text:style-name="T86">Pop </text:span><text:span text:style-name="T81">的是左邊，後 </text:span><text:span text:style-name="T86">Pop </text:span><text:span text:style-name="T81">的是右邊）</text:span><text:span text:style-name="T46">，</text:span><text:span text:style-name="T64">Push </text:span><text:span text:style-name="T46">結果</text:span></text:p>
            <text:p text:style-name="P31" loext:marker-style-name="T193"><text:span text:style-name="T191">⚠️ </text:span><text:span text:style-name="T192">注意：</text:span><text:span text:style-name="T191">Prefix </text:span><text:span text:style-name="T192">的 </text:span><text:span text:style-name="T191">Pop </text:span><text:span text:style-name="T192">順序與 </text:span><text:span text:style-name="T191">Postfix </text:span><text:span text:style-name="T192">相反！</text:span></text:p>
          </table:table-cell>
        </table:table-row>
      </table:table>
      <text:p text:style-name="P8"/>
      <text:p text:style-name="P25" loext:marker-style-name="T24"><text:span text:style-name="T24">範例：+*23 4（代表 (2×3)+4 = 10）</text:span><text:span text:style-name="T24"/></text:p>
      <text:p text:style-name="P1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Standard" loext:marker-style-name="T6"><text:span text:style-name="T5">符號（從右到左）</text:span><text:span text:style-name="T6"/></text:p>
          </table:table-cell>
          <table:table-cell table:style-name="表格27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27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0"><text:span text:style-name="T77">4</text:span><text:span text:style-name="T61">（最右）</text:span></text:p>
          </table:table-cell>
          <table:table-cell table:style-name="表格27.A2" office:value-type="string">
            <text:p text:style-name="Standard" loext:marker-style-name="T60"><text:span text:style-name="T77">Push 4</text:span><text:span text:style-name="T60"/></text:p>
          </table:table-cell>
          <table:table-cell table:style-name="表格27.A2" office:value-type="string">
            <text:p text:style-name="Standard" loext:marker-style-name="T60"><text:span text:style-name="T77">[4]</text:span><text:span text:style-name="T60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0"><text:span text:style-name="T77">3</text:span><text:span text:style-name="T60"/></text:p>
          </table:table-cell>
          <table:table-cell table:style-name="表格27.A3" office:value-type="string">
            <text:p text:style-name="Standard" loext:marker-style-name="T60"><text:span text:style-name="T77">Push 3</text:span><text:span text:style-name="T60"/></text:p>
          </table:table-cell>
          <table:table-cell table:style-name="表格27.A3" office:value-type="string">
            <text:p text:style-name="Standard" loext:marker-style-name="T60"><text:span text:style-name="T77">[4, 3]</text:span><text:span text:style-name="T60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0"><text:span text:style-name="T77">2</text:span><text:span text:style-name="T60"/></text:p>
          </table:table-cell>
          <table:table-cell table:style-name="表格27.A2" office:value-type="string">
            <text:p text:style-name="Standard" loext:marker-style-name="T60"><text:span text:style-name="T77">Push 2</text:span><text:span text:style-name="T60"/></text:p>
          </table:table-cell>
          <table:table-cell table:style-name="表格27.A2" office:value-type="string">
            <text:p text:style-name="Standard" loext:marker-style-name="T60"><text:span text:style-name="T77">[4, 3, 2]</text:span><text:span text:style-name="T60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0"><text:span text:style-name="T77">*</text:span><text:span text:style-name="T60"/></text:p>
          </table:table-cell>
          <table:table-cell table:style-name="表格27.A3" office:value-type="string">
            <text:p text:style-name="Standard" loext:marker-style-name="T60"><text:span text:style-name="T106">Pop 2</text:span><text:span text:style-name="T77">, Pop 3</text:span><text:span text:style-name="T61">，計算 </text:span><text:span text:style-name="T106">2</text:span><text:span text:style-name="T77">×3=6</text:span><text:span text:style-name="T61">，</text:span><text:span text:style-name="T77">Push 6</text:span></text:p>
          </table:table-cell>
          <table:table-cell table:style-name="表格27.A3" office:value-type="string">
            <text:p text:style-name="Standard" loext:marker-style-name="T60"><text:span text:style-name="T77">[4, 6]</text:span><text:span text:style-name="T60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0"><text:span text:style-name="T77">+ </text:span><text:span text:style-name="T61">（最左）</text:span></text:p>
          </table:table-cell>
          <table:table-cell table:style-name="表格27.A2" office:value-type="string">
            <text:p text:style-name="Standard" loext:marker-style-name="T60"><text:span text:style-name="T106">Pop 6</text:span><text:span text:style-name="T77">, Pop 4</text:span><text:span text:style-name="T61">，計算 </text:span><text:span text:style-name="T106">6</text:span><text:span text:style-name="T77">+4=10</text:span><text:span text:style-name="T61">，</text:span><text:span text:style-name="T77">Push 10</text:span></text:p>
          </table:table-cell>
          <table:table-cell table:style-name="表格27.A2" office:value-type="string">
            <text:p text:style-name="Standard" loext:marker-style-name="T60"><text:span text:style-name="T77">[10]</text:span><text:span text:style-name="T60"/></text:p>
          </table:table-cell>
        </table:table-row>
        <table:table-row table:style-name="表格27.1">
          <table:table-cell table:style-name="表格27.A7" office:value-type="string">
            <text:p text:style-name="Standard" loext:marker-style-name="T136"><text:span text:style-name="T135">結果</text:span><text:span text:style-name="T136"/>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Standard" loext:marker-style-name="T136"><text:span text:style-name="T141">★ </text:span><text:span text:style-name="T135">答案 </text:span><text:span text:style-name="T141">= 10</text:span></text:p>
          </table:table-cell>
        </table:table-row>
      </table:table>
      <text:p text:style-name="P6"/>
      <text:h text:style-name="P12" text:outline-level="2" loext:marker-style-name="T30"><text:span text:style-name="T30">Postfix → Expression Tree</text:span><text:span text:style-name="T30"/></text:h>
      <text:p text:style-name="P40">我們在做什麼？</text:p>
      <text:p text:style-name="P41">Postfix 其實只是一種書寫方式，電腦容易處理。但我們需要知道原始的算式結構。</text:p>
      <text:p text:style-name="P45">例如：AB+C* 其實代表什麼？</text:p>
      <text:p text:style-name="P41">答案是：(A+B)*C</text:p>
      <text:p text:style-name="Standard"/>
      <text:p text:style-name="P43">所以這個過程的目的只有一個：從 AB+C* 恢復出 (A+B)*C</text:p>
      <text:p text:style-name="Standard"/>
      <text:p text:style-name="P50">⭐ 最重要的觀念</text:p>
      <text:p text:style-name="P44">Stack 裡放的不是字符（A、B、C、+、*），</text:p>
      <text:p text:style-name="P44">而是逐漸完成的算式。</text:p>
      <text:p text:style-name="Standard"/>
      <text:p text:style-name="P41">看這個表格，一切都清楚了：</text:p>
      <text:p text:style-name="Standard"/>
      <text:p text:style-name="P47">讀到 <text:s text:c="3"/>動作 <text:s text:c="25"/>Stack</text:p>
      <text:p text:style-name="P48">A <text:s text:c="5"/>Push A <text:s text:c="23"/>[A]</text:p>
      <text:p text:style-name="P48">B <text:s text:c="5"/>Push B <text:s text:c="23"/>[A][B]</text:p>
      <text:p text:style-name="P51">+ Pop B、Pop A、組成(A+B)、Push <text:s text:c="2"/>[(A+B)]</text:p>
      <text:p text:style-name="P48">C <text:s text:c="5"/>Push C <text:s text:c="23"/>[(A+B)][C]</text:p>
      <text:p text:style-name="P51">* Pop C、Pop(A+B)、組成((A+B)*C)、Push [((A+B)*C)]</text:p>
      <text:p text:style-name="Standard"/>
      <text:p text:style-name="P56">⚠️ 注意：A、B 不是一直待在 Stack 裡！</text:p>
      <text:p text:style-name="Standard"><text:soft-page-break/></text:p>
      <text:p text:style-name="P41">當看到 + 時：</text:p>
      <text:p text:style-name="P42"><text:s text:c="2"/>✓ Pop B（此時 B 被取出）</text:p>
      <text:p text:style-name="P42"><text:s text:c="2"/>✓ Pop A（此時 A 也被取出，Stack 變空）</text:p>
      <text:p text:style-name="P42"><text:s text:c="2"/>✓ 組成新的「部分算式」：(A+B)</text:p>
      <text:p text:style-name="P42"><text:s text:c="2"/>✓ Push (A+B) 回去（現在 Stack 裡只有一個元素：(A+B)）</text:p>
      <text:p text:style-name="Standard"/>
      <text:p text:style-name="P44">所以 Stack 真正存的是：「已經組好的部分算式」</text:p>
      <text:p text:style-name="Standard"/>
      <text:p text:style-name="P41">(A+B) 其實只是這棵樹的另一種寫法：</text:p>
      <text:p text:style-name="Standard"/>
      <text:p text:style-name="P49"><text:s text:c="2"/>+</text:p>
      <text:p text:style-name="P48"><text:s/>/ \</text:p>
      <text:p text:style-name="P48">A <text:s text:c="2"/>B</text:p>
      <text:p text:style-name="Standard"/>
      <text:p text:style-name="P43">換句話說：Stack 裡存的是「樹」，只是用算式的方式寫出來而已。</text:p>
      <text:p text:style-name="P41">有沒有發現？根本不用提什麼「樹」。</text:p>
      <text:p text:style-name="P43">你只要想成：Stack 裡存的就是「半完成的算式」。</text:p>
      <text:p text:style-name="Standard"/>
      <text:p text:style-name="P40">逐步理解：AB+C*</text:p>
      <text:p text:style-name="Standard"/>
      <text:p text:style-name="P46">讀到 A</text:p>
      <text:p text:style-name="P41">A 就是一個簡單的算式。放進 Stack。</text:p>
      <text:p text:style-name="P48">Stack：[A]</text:p>
      <text:p text:style-name="Standard"/>
      <text:p text:style-name="P46">讀到 B</text:p>
      <text:p text:style-name="P41">B 也是一個簡單的算式。放進 Stack。</text:p>
      <text:p text:style-name="P48">Stack：[A, B]</text:p>
      <text:p text:style-name="Standard"/>
      <text:p text:style-name="P46">讀到 +</text:p>
      <text:p text:style-name="P41">現在遇到一個運算子。運算子需要多少個東西？</text:p>
      <text:p text:style-name="P41">+ 需要兩個。所以從 Stack 拿兩個出來。</text:p>
      <text:p text:style-name="Standard"/>
      <text:p text:style-name="P42">第一次 Pop → B（最後進來的先出來）</text:p>
      <text:p text:style-name="P42">第二次 Pop → A</text:p>
      <text:p text:style-name="P41">把它們組合：A + B = (A+B)</text:p>
      <text:p text:style-name="P41">放回 Stack。</text:p>
      <text:p text:style-name="P52">Stack：[A+B]</text:p>
      <text:p text:style-name="Standard"/>
      <text:p text:style-name="P46">讀到 C</text:p>
      <text:p text:style-name="P41">C 也是一個簡單的算式。放進 Stack。</text:p>
      <text:p text:style-name="P48">Stack：[A+B, C]</text:p>
      <text:p text:style-name="Standard"/>
      <text:p text:style-name="P46">讀到 *</text:p>
      <text:p text:style-name="P41">又遇到一個運算子。* 也需要兩個。</text:p>
      <text:p text:style-name="Standard"/>
      <text:p text:style-name="P42">第一次 Pop → C</text:p>
      <text:p text:style-name="P42">第二次 Pop → A+B</text:p>
      <text:p text:style-name="P41">把它們組合：(A+B) * C = (A+B)*C</text:p>
      <text:p text:style-name="P41">放回 Stack。</text:p>
      <text:p text:style-name="P52">Stack：[A+B)*C]</text:p>
      <text:p text:style-name="Standard"/>
      <text:p text:style-name="P44">完成！Stack 裡剩下的就是原始的算式。</text:p>
      <text:p text:style-name="Standard"/>
      <text:p text:style-name="Standard"><text:soft-page-break/><text:span text:style-name="T39">為什麼先 Pop 出來的是「右邊」？</text:span></text:p>
      <text:p text:style-name="P41">因為 Stack 是 LIFO（Last In First Out）。最後進來的先出來。</text:p>
      <text:p text:style-name="Standard"/>
      <text:p text:style-name="P45">例如：AB-</text:p>
      <text:p text:style-name="P41">A 先進來，B 後進來。</text:p>
      <text:p text:style-name="P41">讀到 -，先 Pop 出 B（後進的），再 Pop 出 A（先進的）。</text:p>
      <text:p text:style-name="P53">所以結果是：A - B（✓ 正確）</text:p>
      <text:p text:style-name="Standard"/>
      <text:p text:style-name="P57">如果反過來（B - A），就完全錯了。</text:p>
      <text:p text:style-name="Standard"/>
      <text:p text:style-name="P40">從算式到樹（最後一步）</text:p>
      <text:p text:style-name="P41">現在你已經理解了 (A+B)*C 這個算式。</text:p>
      <text:p text:style-name="P41">只需要把它畫成樹就可以了。</text:p>
      <text:p text:style-name="Standard"/>
      <text:p text:style-name="P48">*</text:p>
      <text:p text:style-name="P48">/ \</text:p>
      <text:p text:style-name="P48">+ <text:s text:c="2"/>C</text:p>
      <text:p text:style-name="P48">/ \</text:p>
      <text:p text:style-name="P48">A <text:s text:c="2"/>B</text:p>
      <text:p text:style-name="Standard"/>
      <text:p text:style-name="P41">看？這棵樹就是 (A+B)*C 的視覺表示。</text:p>
      <text:p text:style-name="Standard"/>
      <text:p text:style-name="P40">記住最簡單的方式</text:p>
      <text:p text:style-name="P41">不用一開始就記樹的結構。先掌握：</text:p>
      <text:p text:style-name="Standard"/>
      <text:p text:style-name="P54">✓ 遇到字母 → 放進 Stack</text:p>
      <text:p text:style-name="P54">✓ 遇到運算子 → Pop 兩個，組合成新的算式，再放回</text:p>
      <text:p text:style-name="P55">✓ Stack 剩下的就是答案</text:p>
      <text:p text:style-name="Standard"/>
      <text:p text:style-name="P43">等你真的理解了這個過程，再去看「樹」的角度，會自然而然理解的。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 loext:marker-style-name="T24"><text:span text:style-name="T24">範例：AB+C*</text:span><text:span text:style-name="T24"/></text:p>
            <text:p text:style-name="P39" loext:marker-style-name="T47"><text:span text:style-name="T64">① </text:span><text:span text:style-name="T46">看到 </text:span><text:span text:style-name="T64">A → </text:span><text:span text:style-name="T46">建節點 </text:span><text:span text:style-name="T64">A</text:span><text:span text:style-name="T46">，</text:span><text:span text:style-name="T64">Push</text:span></text:p>
            <text:p text:style-name="P36" loext:marker-style-name="T47"><text:span text:style-name="T64">② </text:span><text:span text:style-name="T46">看到 </text:span><text:span text:style-name="T64">B → </text:span><text:span text:style-name="T46">建節點 </text:span><text:span text:style-name="T64">B</text:span><text:span text:style-name="T46">，</text:span><text:span text:style-name="T64">Push</text:span></text:p>
            <text:p text:style-name="P36" loext:marker-style-name="T47"><text:span text:style-name="T64">③ </text:span><text:span text:style-name="T46">看到 </text:span><text:span text:style-name="T64">+ → Pop B</text:span><text:span text:style-name="T46">（右子樹），</text:span><text:span text:style-name="T64">Pop A</text:span><text:span text:style-name="T46">（左子樹），建 </text:span><text:span text:style-name="T64">+ </text:span><text:span text:style-name="T46">節點，</text:span><text:span text:style-name="T64">Push </text:span><text:span text:style-name="T46">這棵小樹</text:span></text:p>
            <text:p text:style-name="P36" loext:marker-style-name="T47"><text:span text:style-name="T64">④ </text:span><text:span text:style-name="T46">看到 </text:span><text:span text:style-name="T64">C → </text:span><text:span text:style-name="T46">建節點 </text:span><text:span text:style-name="T64">C</text:span><text:span text:style-name="T46">，</text:span><text:span text:style-name="T64">Push</text:span></text:p>
            <text:p text:style-name="P37" loext:marker-style-name="T47"><text:span text:style-name="T64">⑤ </text:span><text:span text:style-name="T46">看到 </text:span><text:span text:style-name="T64">* → Pop C</text:span><text:span text:style-name="T46">（右子樹），</text:span><text:span text:style-name="T64">Pop +</text:span><text:span text:style-name="T46">樹（左子樹），建 </text:span><text:span text:style-name="T64">* </text:span><text:span text:style-name="T46">根節點</text:span></text:p>
            <text:p text:style-name="P31" loext:marker-style-name="T34"><text:span text:style-name="T33">結果：根為 </text:span><text:span text:style-name="T44">*</text:span><text:span text:style-name="T33">，左子樹為 </text:span><text:span text:style-name="T44">+</text:span><text:span text:style-name="T33">（左</text:span><text:span text:style-name="T44">A</text:span><text:span text:style-name="T33">右</text:span><text:span text:style-name="T44">B</text:span><text:span text:style-name="T33">），右子樹為 </text:span><text:span text:style-name="T44">C</text:span></text:p>
          </table:table-cell>
        </table:table-row>
      </table:table>
      <text:h text:style-name="P15" text:outline-level="1" loext:marker-style-name="T13"><text:span text:style-name="T12">第八部分：考試速記總整理</text:span><text:span text:style-name="T13"/></text:h>
      <text:p text:style-name="P2"/>
      <text:h text:style-name="P12" text:outline-level="2" loext:marker-style-name="T30"><text:span text:style-name="T29">六大必背考點（重要度排序）</text:span><text:span text:style-name="T30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Standard" loext:marker-style-name="T4"><text:span text:style-name="T3">重要度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考點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關鍵記憶</text:span><text:span text:style-name="T4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2"><text:span text:style-name="T78">★★★★★</text:span><text:span text:style-name="T62"/></text:p>
          </table:table-cell>
          <table:table-cell table:style-name="表格29.A2" office:value-type="string">
            <text:p text:style-name="P5" loext:marker-style-name="T62"><text:span text:style-name="T78">Postfix </text:span><text:span text:style-name="T63">用 </text:span><text:span text:style-name="T78">Stack </text:span><text:span text:style-name="T63">求值</text:span></text:p>
          </table:table-cell>
          <table:table-cell table:style-name="表格29.A2" office:value-type="string">
            <text:p text:style-name="P5" loext:marker-style-name="T62"><text:span text:style-name="T63">從左往右，運算元 </text:span><text:span text:style-name="T78">Push</text:span><text:span text:style-name="T63">，運算子 </text:span><text:span text:style-name="T78">Pop </text:span><text:span text:style-name="T63">兩個計算</text:span></text:p>
          </table:table-cell>
        </table:table-row>
        <table:table-row table:style-name="表格29.1">
          <table:table-cell table:style-name="表格29.A2" office:value-type="string">
            <text:p text:style-name="P5" loext:marker-style-name="T62"><text:span text:style-name="T78">★★★★★</text:span><text:span text:style-name="T62"/></text:p>
          </table:table-cell>
          <table:table-cell table:style-name="表格29.A2" office:value-type="string">
            <text:p text:style-name="P5" loext:marker-style-name="T62"><text:span text:style-name="T78">Infix → Postfix </text:span><text:span text:style-name="T63">轉換</text:span></text:p>
          </table:table-cell>
          <table:table-cell table:style-name="表格29.A2" office:value-type="string">
            <text:p text:style-name="P5" loext:marker-style-name="T62"><text:span text:style-name="T63">五條規則（括號、優先權、左結合）</text:span><text:span text:style-name="T62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2"><text:span text:style-name="T78">★★★★★</text:span><text:span text:style-name="T62"/></text:p>
          </table:table-cell>
          <table:table-cell table:style-name="表格29.A2" office:value-type="string">
            <text:p text:style-name="P5" loext:marker-style-name="T62"><text:span text:style-name="T78">Preorder = Prefix</text:span><text:span text:style-name="T62"/></text:p>
            <text:p text:style-name="P5" loext:marker-style-name="T62"><text:span text:style-name="T78">Inorder = Infix</text:span><text:span text:style-name="T62"/></text:p>
            <text:p text:style-name="P5" loext:marker-style-name="T62"><text:span text:style-name="T78">Postorder = Postfix</text:span><text:span text:style-name="T62"/></text:p>
          </table:table-cell>
          <table:table-cell table:style-name="表格29.A2" office:value-type="string">
            <text:p text:style-name="P5" loext:marker-style-name="T62"><text:span text:style-name="T63">走訪方式 ↔ 表示法對應</text:span><text:span text:style-name="T62"/></text:p>
          </table:table-cell>
        </table:table-row>
        <text:soft-page-break/>
        <table:table-row table:style-name="表格29.1">
          <table:table-cell table:style-name="表格29.A5" office:value-type="string">
            <text:p text:style-name="P5" loext:marker-style-name="T62"><text:span text:style-name="T78">★★★★☆</text:span><text:span text:style-name="T62"/></text:p>
          </table:table-cell>
          <table:table-cell table:style-name="表格29.A5" office:value-type="string">
            <text:p text:style-name="P5" loext:marker-style-name="T62"><text:span text:style-name="T78">Expression Tree </text:span><text:span text:style-name="T63">建樹</text:span></text:p>
          </table:table-cell>
          <table:table-cell table:style-name="表格29.A5" office:value-type="string">
            <text:p text:style-name="P5" loext:marker-style-name="T62"><text:span text:style-name="T63">找最後算的運算子 </text:span><text:span text:style-name="T78">= </text:span><text:span text:style-name="T63">根節點，遞迴拆解</text:span></text:p>
          </table:table-cell>
        </table:table-row>
        <table:table-row table:style-name="表格29.1">
          <table:table-cell table:style-name="表格29.A5" office:value-type="string">
            <text:p text:style-name="P5" loext:marker-style-name="T62"><text:span text:style-name="T78">★★★★☆</text:span><text:span text:style-name="T62"/></text:p>
          </table:table-cell>
          <table:table-cell table:style-name="表格29.A5" office:value-type="string">
            <text:p text:style-name="P5" loext:marker-style-name="T62"><text:span text:style-name="T78">Prefix </text:span><text:span text:style-name="T63">用 </text:span><text:span text:style-name="T78">Stack </text:span><text:span text:style-name="T63">求值</text:span></text:p>
          </table:table-cell>
          <table:table-cell table:style-name="表格29.A5" office:value-type="string">
            <text:p text:style-name="P5" loext:marker-style-name="T62"><text:span text:style-name="T63">從右往左，先 </text:span><text:span text:style-name="T78">Pop </text:span><text:span text:style-name="T63">的是左運算元</text:span></text:p>
          </table:table-cell>
        </table:table-row>
        <table:table-row table:style-name="表格29.1">
          <table:table-cell table:style-name="表格29.A7" office:value-type="string">
            <text:p text:style-name="P5" loext:marker-style-name="T62"><text:span text:style-name="T78">★★★☆☆</text:span><text:span text:style-name="T62"/></text:p>
          </table:table-cell>
          <table:table-cell table:style-name="表格29.A7" office:value-type="string">
            <text:p text:style-name="P5" loext:marker-style-name="T62"><text:span text:style-name="T78">Postfix → Expression Tree</text:span><text:span text:style-name="T62"/></text:p>
          </table:table-cell>
          <table:table-cell table:style-name="表格29.A7" office:value-type="string">
            <text:p text:style-name="P5" loext:marker-style-name="T62"><text:span text:style-name="T63">運算元建節點 </text:span><text:span text:style-name="T78">Push</text:span><text:span text:style-name="T63">，運算子合併兩棵子樹</text:span></text:p>
          </table:table-cell>
        </table:table-row>
      </table:table>
      <text:p text:style-name="P6"/>
      <text:h text:style-name="P12" text:outline-level="2" loext:marker-style-name="T30"><text:span text:style-name="T30">Infix → Postfix </text:span><text:span text:style-name="T29">考前速記卡</text:span>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7" loext:marker-style-name="T25"><text:span text:style-name="T25">1. Operand（運算元） → 直接輸出</text:span><text:span text:style-name="T25"/></text:p>
            <text:p text:style-name="P36" loext:marker-style-name="T25"><text:span text:style-name="T25">2. <text:s/>( <text:s/>→ Push</text:span><text:span text:style-name="T25"/></text:p>
            <text:p text:style-name="P36" loext:marker-style-name="T25"><text:span text:style-name="T25">3. <text:s/>) <text:s/>→ Pop 直到 (（括號不輸出）</text:span><text:span text:style-name="T25"/></text:p>
            <text:p text:style-name="P36" loext:marker-style-name="T25"><text:span text:style-name="T25">4. Operator → Stack 頂優先 ≥ 自己 → 先 Pop，再 Push</text:span><text:span text:style-name="T25"/></text:p>
            <text:p text:style-name="P37" loext:marker-style-name="T25"><text:span text:style-name="T25">5. 讀完 → Stack 全部 Pop 輸出</text:span><text:span text:style-name="T25"/></text:p>
          </table:table-cell>
        </table:table-row>
      </table:table>
      <text:p text:style-name="P10"/>
      <text:h text:style-name="P12" text:outline-level="2" loext:marker-style-name="T30"><text:span text:style-name="T29">三種表示法互轉速查表</text:span><text:span text:style-name="T30"/>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Standard" loext:marker-style-name="T6"><text:span text:style-name="T5">表示法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算式範例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特點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求值方法</text:span><text:span text:style-name="T6"/></text:p>
          </table:table-cell>
        </table:table-row>
        <table:table-row table:style-name="表格31.1">
          <table:table-cell table:style-name="表格31.A2" office:value-type="string">
            <text:p text:style-name="Standard" loext:marker-style-name="T62"><text:span text:style-name="T78">Prefix </text:span><text:span text:style-name="T63">前置式</text:span></text:p>
          </table:table-cell>
          <table:table-cell table:style-name="表格31.A2" office:value-type="string">
            <text:p text:style-name="Standard" loext:marker-style-name="T62"><text:span text:style-name="T78">+AB</text:span><text:span text:style-name="T62"/></text:p>
          </table:table-cell>
          <table:table-cell table:style-name="表格31.A2" office:value-type="string">
            <text:p text:style-name="Standard" loext:marker-style-name="T62"><text:span text:style-name="T63">運算子在前</text:span><text:span text:style-name="T62"/></text:p>
          </table:table-cell>
          <table:table-cell table:style-name="表格31.A2" office:value-type="string">
            <text:p text:style-name="Standard" loext:marker-style-name="T62"><text:span text:style-name="T78">Stack</text:span><text:span text:style-name="T63">，從右往左讀</text:span></text:p>
          </table:table-cell>
        </table:table-row>
        <table:table-row table:style-name="表格31.1">
          <table:table-cell table:style-name="表格31.A3" office:value-type="string">
            <text:p text:style-name="Standard" loext:marker-style-name="T62"><text:span text:style-name="T78">Infix </text:span><text:span text:style-name="T63">中置式</text:span></text:p>
          </table:table-cell>
          <table:table-cell table:style-name="表格31.A3" office:value-type="string">
            <text:p text:style-name="Standard" loext:marker-style-name="T62"><text:span text:style-name="T78">A+B</text:span><text:span text:style-name="T62"/></text:p>
          </table:table-cell>
          <table:table-cell table:style-name="表格31.A3" office:value-type="string">
            <text:p text:style-name="Standard" loext:marker-style-name="T62"><text:span text:style-name="T63">人類習慣寫法，需括號</text:span><text:span text:style-name="T62"/></text:p>
          </table:table-cell>
          <table:table-cell table:style-name="表格31.A3" office:value-type="string">
            <text:p text:style-name="Standard" loext:marker-style-name="T62"><text:span text:style-name="T63">需考慮優先權</text:span><text:span text:style-name="T62"/></text:p>
          </table:table-cell>
        </table:table-row>
        <table:table-row table:style-name="表格31.1">
          <table:table-cell table:style-name="表格31.A4" office:value-type="string">
            <text:p text:style-name="Standard" loext:marker-style-name="T62"><text:span text:style-name="T78">Postfix </text:span><text:span text:style-name="T63">後置式</text:span></text:p>
          </table:table-cell>
          <table:table-cell table:style-name="表格31.A4" office:value-type="string">
            <text:p text:style-name="Standard" loext:marker-style-name="T62"><text:span text:style-name="T78">AB+</text:span><text:span text:style-name="T62"/></text:p>
          </table:table-cell>
          <table:table-cell table:style-name="表格31.A4" office:value-type="string">
            <text:p text:style-name="Standard" loext:marker-style-name="T62"><text:span text:style-name="T63">無括號，電腦最愛</text:span><text:span text:style-name="T62"/></text:p>
          </table:table-cell>
          <table:table-cell table:style-name="表格31.A4" office:value-type="string">
            <text:p text:style-name="Standard" loext:marker-style-name="T62"><text:span text:style-name="T78">Stack</text:span><text:span text:style-name="T63">，從左往右讀</text:span>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58" loext:marker-style-name="T22"><text:span text:style-name="T23">最終核心記憶句（一句話串起整章）</text:span><text:span text:style-name="T22"/></text:p>
            <text:p text:style-name="P24" loext:marker-style-name="T41"><text:span text:style-name="T40">「</text:span><text:span text:style-name="T45">Expression Tree </text:span><text:span text:style-name="T40">求值 </text:span><text:span text:style-name="T45">= Postorder </text:span><text:span text:style-name="T40">走訪 </text:span><text:span text:style-name="T45">= Postfix </text:span><text:span text:style-name="T40">計算 </text:span><text:span text:style-name="T45">= Stack</text:span><text:span text:style-name="T40">」</text:span></text:p>
            <text:p text:style-name="P59" loext:marker-style-name="T47"><text:span text:style-name="T46">只要懂這一句，整章 </text:span><text:span text:style-name="T64">Expression Tree </text:span><text:span text:style-name="T46">的題目就全部打通。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0T01:48:15</meta:creation-date>
    <meta:initial-creator>Un-named</meta:initial-creator>
    <dc:language>en-US</dc:language>
    <dc:date>2026-06-11T12:13:28</dc:date>
    <meta:editing-cycles>79</meta:editing-cycles>
    <meta:editing-duration>PT11H53M</meta:editing-duration>
    <meta:generator>MODA_ODF_Application_Tools/3.8.4.2$Windows_X86_64 LibreOffice_project/4fb77107d5af14329e08085efe4fa19b5633383a</meta:generator>
    <meta:document-statistic meta:table-count="32" meta:image-count="0" meta:object-count="0" meta:page-count="15" meta:paragraph-count="613" meta:word-count="4139" meta:character-count="7615" meta:non-whitespace-character-count="6201"/>
    <meta:user-defined meta:name="AppVersion">15.0000</meta:user-defined>
  </office:meta>
</office:document-meta>
</file>