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864" fo:padding-left="0.635cm" fo:padding-right="0.635cm" fo:padding-top="0.423cm" fo:padding-bottom="0.423cm" fo:border="none">
        <style:background-image/>
      </style:table-cell-properties>
    </style:style>
    <style:style style:name="表格2" style:family="table">
      <style:table-properties style:width="16.51cm" fo:margin-left="0.004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style:min-row-height="3.016cm" fo:keep-together="auto"/>
    </style:style>
    <style:style style:name="表格2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3" style:family="table">
      <style:table-properties style:width="16.51cm" fo:margin-left="0.004cm" fo:margin-top="0cm" fo:margin-bottom="0cm" table:align="left" style:writing-mode="page"/>
    </style:style>
    <style:style style:name="表格3.A" style:family="table-column">
      <style:table-column-properties style:column-width="16.51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2f2" fo:padding-left="0.318cm" fo:padding-right="0.318cm" fo:padding-top="0.212cm" fo:padding-bottom="0.212cm" fo:border="0.25pt solid #cccccc">
        <style:background-image/>
      </style:table-cell-properties>
    </style:style>
    <style:style style:name="表格4" style:family="table">
      <style:table-properties style:width="16.51cm" fo:margin-left="0.004cm" fo:margin-top="0cm" fo:margin-bottom="0cm" table:align="left" style:writing-mode="page"/>
    </style:style>
    <style:style style:name="表格4.A" style:family="table-column">
      <style:table-column-properties style:column-width="4.128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4.A2" style:family="table-cell">
      <style:table-cell-properties fo:background-color="#d4edda" fo:padding-left="0.212cm" fo:padding-right="0.212cm" fo:padding-top="0.141cm" fo:padding-bottom="0.141cm" fo:border="0.25pt solid #cccccc">
        <style:background-image/>
      </style:table-cell-properties>
    </style:style>
    <style:style style:name="表格4.A3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4.A4" style:family="table-cell">
      <style:table-cell-properties fo:background-color="#d0eef0" fo:padding-left="0.212cm" fo:padding-right="0.212cm" fo:padding-top="0.141cm" fo:padding-bottom="0.141cm" fo:border="0.25pt solid #cccccc">
        <style:background-image/>
      </style:table-cell-properties>
    </style:style>
    <style:style style:name="表格5" style:family="table">
      <style:table-properties style:width="16.51cm" fo:margin-left="0.004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6" style:family="table">
      <style:table-properties style:width="16.51cm" fo:margin-left="0.004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cea" fo:padding-left="0.318cm" fo:padding-right="0.318cm" fo:padding-top="0.212cm" fo:padding-bottom="0.212cm" fo:border="0.25pt solid #8b0000">
        <style:background-image/>
      </style:table-cell-properties>
    </style:style>
    <style:style style:name="表格7" style:family="table">
      <style:table-properties style:width="16.51cm" fo:margin-left="0.004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8" style:family="table">
      <style:table-properties style:width="16.51cm" fo:margin-left="0.004cm" fo:margin-top="0cm" fo:margin-bottom="0cm" table:align="left" style:writing-mode="page"/>
    </style:style>
    <style:style style:name="表格8.A" style:family="table-column">
      <style:table-column-properties style:column-width="2.115cm"/>
    </style:style>
    <style:style style:name="表格8.B" style:family="table-column">
      <style:table-column-properties style:column-width="4.941cm"/>
    </style:style>
    <style:style style:name="表格8.C" style:family="table-column">
      <style:table-column-properties style:column-width="9.454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8.A2" style:family="table-cell">
      <style:table-cell-properties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8.A3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9" style:family="table">
      <style:table-properties style:width="16.51cm" fo:margin-left="0.004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10" style:family="table">
      <style:table-properties style:width="16.51cm" fo:margin-left="0.004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4edda" fo:padding-left="0.318cm" fo:padding-right="0.318cm" fo:padding-top="0.212cm" fo:padding-bottom="0.212cm" fo:border="0.25pt solid #1e5631">
        <style:background-image/>
      </style:table-cell-properties>
    </style:style>
    <style:style style:name="表格11" style:family="table">
      <style:table-properties style:width="16.51cm" fo:margin-left="0.004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12" style:family="table">
      <style:table-properties style:width="16.51cm" fo:margin-left="0.004cm" fo:margin-top="0cm" fo:margin-bottom="0cm" table:align="left" style:writing-mode="page"/>
    </style:style>
    <style:style style:name="表格12.A" style:family="table-column">
      <style:table-column-properties style:column-width="1.057cm"/>
    </style:style>
    <style:style style:name="表格12.B" style:family="table-column">
      <style:table-column-properties style:column-width="1.413cm"/>
    </style:style>
    <style:style style:name="表格12.C" style:family="table-column">
      <style:table-column-properties style:column-width="6.274cm"/>
    </style:style>
    <style:style style:name="表格12.D" style:family="table-column">
      <style:table-column-properties style:column-width="3.533cm"/>
    </style:style>
    <style:style style:name="表格12.E" style:family="table-column">
      <style:table-column-properties style:column-width="4.2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1f3864" fo:padding="0.141cm" fo:border="0.25pt solid #cccccc">
        <style:background-image/>
      </style:table-cell-properties>
    </style:style>
    <style:style style:name="表格12.A2" style:family="table-cell">
      <style:table-cell-properties fo:background-color="#ffffff" fo:padding-left="0.141cm" fo:padding-right="0.141cm" fo:padding-top="0.106cm" fo:padding-bottom="0.106cm" fo:border="0.25pt solid #cccccc">
        <style:background-image/>
      </style:table-cell-properties>
    </style:style>
    <style:style style:name="表格12.A3" style:family="table-cell">
      <style:table-cell-properties fo:background-color="#f2f2f2" fo:padding-left="0.141cm" fo:padding-right="0.141cm" fo:padding-top="0.106cm" fo:padding-bottom="0.106cm" fo:border="0.25pt solid #cccccc">
        <style:background-image/>
      </style:table-cell-properties>
    </style:style>
    <style:style style:name="表格12.A13" style:family="table-cell">
      <style:table-cell-properties fo:background-color="#d4edda" fo:padding-left="0.141cm" fo:padding-right="0.141cm" fo:padding-top="0.106cm" fo:padding-bottom="0.106cm" fo:border="0.25pt solid #cccccc">
        <style:background-image/>
      </style:table-cell-properties>
    </style:style>
    <style:style style:name="表格13" style:family="table">
      <style:table-properties style:width="16.51cm" fo:margin-left="0.004cm" fo:margin-top="0cm" fo:margin-bottom="0cm" table:align="left" style:writing-mode="page"/>
    </style:style>
    <style:style style:name="表格13.A" style:family="table-column">
      <style:table-column-properties style:column-width="1.057cm"/>
    </style:style>
    <style:style style:name="表格13.B" style:family="table-column">
      <style:table-column-properties style:column-width="1.413cm"/>
    </style:style>
    <style:style style:name="表格13.C" style:family="table-column">
      <style:table-column-properties style:column-width="6.274cm"/>
    </style:style>
    <style:style style:name="表格13.D" style:family="table-column">
      <style:table-column-properties style:column-width="3.533cm"/>
    </style:style>
    <style:style style:name="表格13.E" style:family="table-column">
      <style:table-column-properties style:column-width="4.2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1f3864" fo:padding="0.141cm" fo:border="0.25pt solid #cccccc">
        <style:background-image/>
      </style:table-cell-properties>
    </style:style>
    <style:style style:name="表格13.A2" style:family="table-cell">
      <style:table-cell-properties fo:background-color="#ffffff" fo:padding-left="0.141cm" fo:padding-right="0.141cm" fo:padding-top="0.106cm" fo:padding-bottom="0.106cm" fo:border="0.25pt solid #cccccc">
        <style:background-image/>
      </style:table-cell-properties>
    </style:style>
    <style:style style:name="表格13.A3" style:family="table-cell">
      <style:table-cell-properties fo:background-color="#f2f2f2" fo:padding-left="0.141cm" fo:padding-right="0.141cm" fo:padding-top="0.106cm" fo:padding-bottom="0.106cm" fo:border="0.25pt solid #cccccc">
        <style:background-image/>
      </style:table-cell-properties>
    </style:style>
    <style:style style:name="表格13.A11" style:family="table-cell">
      <style:table-cell-properties fo:background-color="#d4edda" fo:padding-left="0.141cm" fo:padding-right="0.141cm" fo:padding-top="0.106cm" fo:padding-bottom="0.106cm" fo:border="0.25pt solid #cccccc">
        <style:background-image/>
      </style:table-cell-properties>
    </style:style>
    <style:style style:name="表格14" style:family="table">
      <style:table-properties style:width="16.51cm" fo:margin-left="0.004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ff3cd" fo:padding-left="0.318cm" fo:padding-right="0.318cm" fo:padding-top="0.212cm" fo:padding-bottom="0.212cm" fo:border="0.25pt solid #7b3f00">
        <style:background-image/>
      </style:table-cell-properties>
    </style:style>
    <style:style style:name="表格15" style:family="table">
      <style:table-properties style:width="16.51cm" fo:margin-left="0.004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16" style:family="table">
      <style:table-properties style:width="16.51cm" fo:margin-left="0.004cm" fo:margin-top="0cm" fo:margin-bottom="0cm" table:align="left" style:writing-mode="page"/>
    </style:style>
    <style:style style:name="表格16.A" style:family="table-column">
      <style:table-column-properties style:column-width="1.057cm"/>
    </style:style>
    <style:style style:name="表格16.B" style:family="table-column">
      <style:table-column-properties style:column-width="9.103cm"/>
    </style:style>
    <style:style style:name="表格16.C" style:family="table-column">
      <style:table-column-properties style:column-width="6.3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16.A2" style:family="table-cell">
      <style:table-cell-properties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6.A3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16.A10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17" style:family="table">
      <style:table-properties style:width="16.51cm" fo:margin-left="0.004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18" style:family="table">
      <style:table-properties style:width="9.525cm" fo:margin-left="0.004cm" fo:margin-top="0cm" fo:margin-bottom="0cm" table:align="left" style:writing-mode="page"/>
    </style:style>
    <style:style style:name="表格18.A" style:family="table-column">
      <style:table-column-properties style:column-width="4.763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18.A2" style:family="table-cell">
      <style:table-cell-properties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8.A3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19" style:family="table">
      <style:table-properties style:width="16.51cm" fo:margin-left="0.004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20" style:family="table">
      <style:table-properties style:width="16.51cm" fo:margin-left="0.004cm" fo:margin-top="0cm" fo:margin-bottom="0cm" table:align="left" style:writing-mode="page"/>
    </style:style>
    <style:style style:name="表格20.A" style:family="table-column">
      <style:table-column-properties style:column-width="2.752cm"/>
    </style:style>
    <style:style style:name="表格20.B" style:family="table-column">
      <style:table-column-properties style:column-width="7.408cm"/>
    </style:style>
    <style:style style:name="表格20.C" style:family="table-column">
      <style:table-column-properties style:column-width="6.3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0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0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0.A8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1" style:family="table">
      <style:table-properties style:width="16.51cm" fo:margin-left="0.004cm" fo:margin-top="0cm" fo:margin-bottom="0cm" table:align="left" style:writing-mode="page"/>
    </style:style>
    <style:style style:name="表格21.A" style:family="table-column">
      <style:table-column-properties style:column-width="2.752cm"/>
    </style:style>
    <style:style style:name="表格21.B" style:family="table-column">
      <style:table-column-properties style:column-width="7.408cm"/>
    </style:style>
    <style:style style:name="表格21.C" style:family="table-column">
      <style:table-column-properties style:column-width="6.3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1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1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1.A10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2" style:family="table">
      <style:table-properties style:width="16.51cm" fo:margin-left="0.004cm" fo:margin-top="0cm" fo:margin-bottom="0cm" table:align="left" style:writing-mode="page"/>
    </style:style>
    <style:style style:name="表格22.A" style:family="table-column">
      <style:table-column-properties style:column-width="2.752cm"/>
    </style:style>
    <style:style style:name="表格22.B" style:family="table-column">
      <style:table-column-properties style:column-width="7.408cm"/>
    </style:style>
    <style:style style:name="表格22.C" style:family="table-column">
      <style:table-column-properties style:column-width="6.3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2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2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2.A10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3" style:family="table">
      <style:table-properties style:width="16.51cm" fo:margin-left="0.004cm" fo:margin-top="0cm" fo:margin-bottom="0cm" table:align="left" style:writing-mode="page"/>
    </style:style>
    <style:style style:name="表格23.A" style:family="table-column">
      <style:table-column-properties style:column-width="2.752cm"/>
    </style:style>
    <style:style style:name="表格23.B" style:family="table-column">
      <style:table-column-properties style:column-width="7.408cm"/>
    </style:style>
    <style:style style:name="表格23.C" style:family="table-column">
      <style:table-column-properties style:column-width="6.35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3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3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3.A14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4" style:family="table">
      <style:table-properties style:width="16.51cm" fo:margin-left="0.004cm" fo:margin-top="0cm" fo:margin-bottom="0cm" table:align="left" style:writing-mode="page"/>
    </style:style>
    <style:style style:name="表格24.A" style:family="table-column">
      <style:table-column-properties style:column-width="2.752cm"/>
    </style:style>
    <style:style style:name="表格24.B" style:family="table-column">
      <style:table-column-properties style:column-width="7.408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4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4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4.A14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5" style:family="table">
      <style:table-properties style:width="16.51cm" fo:margin-left="0.004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decea" fo:padding-left="0.318cm" fo:padding-right="0.318cm" fo:padding-top="0.212cm" fo:padding-bottom="0.212cm" fo:border="0.25pt solid #8b0000">
        <style:background-image/>
      </style:table-cell-properties>
    </style:style>
    <style:style style:name="表格26" style:family="table">
      <style:table-properties style:width="16.51cm" fo:margin-left="0.004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27" style:family="table">
      <style:table-properties style:width="16.51cm" fo:margin-left="0.004cm" fo:margin-top="0cm" fo:margin-bottom="0cm" table:align="left" style:writing-mode="page"/>
    </style:style>
    <style:style style:name="表格27.A" style:family="table-column">
      <style:table-column-properties style:column-width="3.171cm"/>
    </style:style>
    <style:style style:name="表格27.B" style:family="table-column">
      <style:table-column-properties style:column-width="7.689cm"/>
    </style:style>
    <style:style style:name="表格27.C" style:family="table-column">
      <style:table-column-properties style:column-width="5.65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7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7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7.A7" style:family="table-cell">
      <style:table-cell-properties fo:background-color="#d4edda" fo:padding-left="0.212cm" fo:padding-right="0.212cm" fo:padding-top="0.106cm" fo:padding-bottom="0.106cm" fo:border="0.25pt solid #cccccc">
        <style:background-image/>
      </style:table-cell-properties>
    </style:style>
    <style:style style:name="表格28" style:family="table">
      <style:table-properties style:width="16.51cm" fo:margin-left="0.004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29" style:family="table">
      <style:table-properties style:width="16.51cm" fo:margin-left="0.004cm" fo:margin-top="0cm" fo:margin-bottom="0cm" table:align="left" style:writing-mode="page"/>
    </style:style>
    <style:style style:name="表格29.A" style:family="table-column">
      <style:table-column-properties style:column-width="2.115cm"/>
    </style:style>
    <style:style style:name="表格29.B" style:family="table-column">
      <style:table-column-properties style:column-width="5.572cm"/>
    </style:style>
    <style:style style:name="表格29.C" style:family="table-column">
      <style:table-column-properties style:column-width="8.823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9.A2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29.A5" style:family="table-cell">
      <style:table-cell-properties fo:background-color="#d0eef0" fo:padding-left="0.212cm" fo:padding-right="0.212cm" fo:padding-top="0.141cm" fo:padding-bottom="0.141cm" fo:border="0.25pt solid #cccccc">
        <style:background-image/>
      </style:table-cell-properties>
    </style:style>
    <style:style style:name="表格29.A7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30" style:family="table">
      <style:table-properties style:width="16.51cm" fo:margin-left="0.004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31" style:family="table">
      <style:table-properties style:width="16.51cm" fo:margin-left="0.004cm" fo:margin-top="0cm" fo:margin-bottom="0cm" table:align="left" style:writing-mode="page"/>
    </style:style>
    <style:style style:name="表格31.A" style:family="table-column">
      <style:table-column-properties style:column-width="4.128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31.A2" style:family="table-cell">
      <style:table-cell-properties fo:background-color="#d0eef0" fo:padding-left="0.212cm" fo:padding-right="0.212cm" fo:padding-top="0.141cm" fo:padding-bottom="0.141cm" fo:border="0.25pt solid #cccccc">
        <style:background-image/>
      </style:table-cell-properties>
    </style:style>
    <style:style style:name="表格31.A3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31.A4" style:family="table-cell">
      <style:table-cell-properties fo:background-color="#d4edda" fo:padding-left="0.212cm" fo:padding-right="0.212cm" fo:padding-top="0.141cm" fo:padding-bottom="0.141cm" fo:border="0.25pt solid #cccccc">
        <style:background-image/>
      </style:table-cell-properties>
    </style:style>
    <style:style style:name="表格32" style:family="table">
      <style:table-properties style:width="16.51cm" fo:margin-left="0.004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41cm" fo:margin-bottom="0cm" style:contextual-spacing="false" fo:text-align="center" style:justify-single-word="false"/>
    </style:style>
    <style:style style:name="P3" style:family="paragraph" style:parent-style-name="Standard">
      <style:paragraph-properties fo:margin-top="0.353cm" fo:margin-bottom="0cm" style:contextual-spacing="false"/>
    </style:style>
    <style:style style:name="P4" style:family="paragraph" style:parent-style-name="Heading_20_1">
      <style:paragraph-properties fo:margin-left="0cm" fo:margin-right="0cm" fo:margin-top="0.635cm" fo:margin-bottom="0.212cm" style:contextual-spacing="false" fo:text-indent="0cm" style:auto-text-indent="false"/>
    </style:style>
    <style:style style:name="P5" style:family="paragraph" style:parent-style-name="Standard">
      <style:paragraph-properties fo:margin-top="0.282cm" fo:margin-bottom="0.282cm" style:contextual-spacing="false" fo:padding-left="0cm" fo:padding-right="0cm" fo:padding-top="0cm" fo:padding-bottom="0.035cm" fo:border-left="none" fo:border-right="none" fo:border-top="none" fo:border-bottom="0.51pt solid #1a6b72"/>
    </style:style>
    <style:style style:name="P6" style:family="paragraph" style:parent-style-name="Heading_20_2">
      <style:paragraph-properties fo:margin-left="0cm" fo:margin-right="0cm" fo:margin-top="0.494cm" fo:margin-bottom="0.176cm" style:contextual-spacing="false" fo:text-indent="0cm" style:auto-text-indent="false"/>
    </style:style>
    <style:style style:name="P7" style:family="paragraph" style:parent-style-name="Standard">
      <style:paragraph-properties fo:margin-top="0.106cm" fo:margin-bottom="0.106cm" style:contextual-spacing="false"/>
    </style:style>
    <style:style style:name="P8" style:family="paragraph" style:parent-style-name="Standard">
      <style:paragraph-properties fo:margin-top="0.106cm" fo:margin-bottom="0cm" style:contextual-spacing="false"/>
    </style:style>
    <style:style style:name="P9" style:family="paragraph" style:parent-style-name="Standard">
      <style:paragraph-properties fo:margin-top="0.071cm" fo:margin-bottom="0.071cm" style:contextual-spacing="false"/>
    </style:style>
    <style:style style:name="P10" style:family="paragraph" style:parent-style-name="Standard">
      <style:paragraph-properties fo:margin-top="0.035cm" fo:margin-bottom="0.035cm" style:contextual-spacing="false"/>
    </style:style>
    <style:style style:name="P11" style:family="paragraph" style:parent-style-name="Standard">
      <style:paragraph-properties fo:margin-top="0.212cm" fo:margin-bottom="0cm" style:contextual-spacing="false"/>
    </style:style>
    <style:style style:name="P12" style:family="paragraph" style:parent-style-name="Standard">
      <style:paragraph-properties fo:margin-top="0.106cm" fo:margin-bottom="0.035cm" style:contextual-spacing="false" fo:text-align="center" style:justify-single-word="false"/>
    </style:style>
    <style:style style:name="P13" style:family="paragraph" style:parent-style-name="Standard">
      <style:paragraph-properties fo:margin-top="0cm" fo:margin-bottom="0.035cm" style:contextual-spacing="false" fo:text-align="center" style:justify-single-word="false"/>
    </style:style>
    <style:style style:name="P14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15" style:family="paragraph" style:parent-style-name="Standard">
      <style:paragraph-properties fo:margin-top="0.071cm" fo:margin-bottom="0.035cm" style:contextual-spacing="false"/>
    </style:style>
    <style:style style:name="P16" style:family="paragraph" style:parent-style-name="Heading_20_1">
      <style:paragraph-properties fo:margin-left="0cm" fo:margin-right="0cm" fo:margin-top="0cm" fo:margin-bottom="0.212cm" style:contextual-spacing="false" fo:text-indent="0cm" style:auto-text-indent="false" fo:break-before="page"/>
    </style:style>
    <style:style style:name="P17" style:family="paragraph" style:parent-style-name="Standard">
      <style:paragraph-properties fo:margin-top="0.141cm" fo:margin-bottom="0cm" style:contextual-spacing="false"/>
    </style:style>
    <style:style style:name="P18" style:family="paragraph" style:parent-style-name="Standard">
      <style:text-properties fo:color="#7b3f00" loext:opacity="100%" style:font-name="Arial" fo:font-size="10pt" style:font-name-asian="Arial2" style:font-size-asian="10pt" style:font-name-complex="Arial2" style:font-size-complex="10pt"/>
    </style:style>
    <style:style style:name="P19" style:family="paragraph" style:parent-style-name="Standard">
      <style:paragraph-properties fo:margin-top="0.035cm" fo:margin-bottom="0.071cm" style:contextual-spacing="false"/>
    </style:style>
    <style:style style:name="P20" style:family="paragraph" style:parent-style-name="Standard">
      <style:paragraph-properties fo:margin-top="0cm" fo:margin-bottom="0.035cm" style:contextual-spacing="false"/>
    </style:style>
    <style:style style:name="P21" style:family="paragraph" style:parent-style-name="Standard">
      <style:paragraph-properties fo:margin-top="0.141cm" fo:margin-bottom="0.141cm" style:contextual-spacing="false" fo:text-align="center" style:justify-single-word="false"/>
    </style:style>
    <style:style style:name="P22" style:family="paragraph" style:parent-style-name="Standard">
      <style:paragraph-properties fo:margin-top="0.176cm" fo:margin-bottom="0cm" style:contextual-spacing="false"/>
    </style:style>
    <style:style style:name="P23" style:family="paragraph" style:parent-style-name="Standard">
      <style:paragraph-properties fo:margin-top="0.353cm" fo:margin-bottom="0.141cm" style:contextual-spacing="false"/>
    </style:style>
    <style:style style:name="P24" style:family="paragraph" style:parent-style-name="Standard">
      <style:paragraph-properties fo:margin-top="0.071cm" fo:margin-bottom="0.018cm" style:contextual-spacing="false"/>
    </style:style>
    <style:style style:name="P25" style:family="paragraph" style:parent-style-name="Standard">
      <style:paragraph-properties fo:margin-top="0cm" fo:margin-bottom="0.018cm" style:contextual-spacing="false"/>
    </style:style>
    <style:style style:name="P26" style:family="paragraph" style:parent-style-name="Standard">
      <style:paragraph-properties fo:margin-top="0cm" fo:margin-bottom="0.106cm" style:contextual-spacing="false"/>
    </style:style>
    <style:style style:name="P27" style:family="paragraph" style:parent-style-name="Standard">
      <style:paragraph-properties fo:margin-top="0.018cm" fo:margin-bottom="0.018cm" style:contextual-spacing="false"/>
    </style:style>
    <style:style style:name="P28" style:family="paragraph" style:parent-style-name="Standard">
      <style:paragraph-properties fo:margin-top="0.018cm" fo:margin-bottom="0.071cm" style:contextual-spacing="false"/>
    </style:style>
    <style:style style:name="P29" style:family="paragraph" style:parent-style-name="Standard">
      <style:paragraph-properties fo:margin-top="0.018cm" fo:margin-bottom="0.035cm" style:contextual-spacing="false"/>
    </style:style>
    <style:style style:name="P30" style:family="paragraph" style:parent-style-name="Standard">
      <style:paragraph-properties fo:margin-top="0.071cm" fo:margin-bottom="0.018cm" style:contextual-spacing="false" fo:text-align="center" style:justify-single-word="false"/>
    </style:style>
    <style:style style:name="P31" style:family="paragraph" style:parent-style-name="Standard">
      <style:paragraph-properties fo:margin-top="0.035cm" fo:margin-bottom="0.018cm" style:contextual-spacing="false"/>
    </style:style>
    <style:style style:name="P32" style:family="paragraph" style:parent-style-name="Standard">
      <style:paragraph-properties fo:margin-top="0.053cm" fo:margin-bottom="0.053cm" style:contextual-spacing="false" fo:text-align="center" style:justify-single-word="false"/>
    </style:style>
    <style:style style:name="P33" style:family="paragraph" style:parent-style-name="Standard">
      <style:paragraph-properties fo:margin-top="0.071cm" fo:margin-bottom="0cm" style:contextual-spacing="false"/>
    </style:style>
    <style:style style:name="P34" style:family="paragraph" style:parent-style-name="Standard">
      <style:text-properties fo:color="#1a6b72" loext:opacity="100%" style:font-name="Arial" fo:font-size="13pt" fo:font-weight="bold" style:font-name-asian="Arial2" style:font-size-asian="13pt" style:font-weight-asian="bold"/>
    </style:style>
    <style:style style:name="P35" style:family="paragraph" style:parent-style-name="Standard">
      <style:text-properties fo:color="#444444" loext:opacity="100%" style:font-name="Arial" fo:font-size="11pt" style:font-name-asian="Arial2" style:font-size-asian="11pt"/>
    </style:style>
    <style:style style:name="P36" style:family="paragraph" style:parent-style-name="Standard">
      <style:text-properties fo:color="#1f3864" loext:opacity="100%" style:font-name="Arial" fo:font-size="11pt" fo:font-weight="bold" style:font-name-asian="Arial2" style:font-size-asian="11pt" style:font-weight-asian="bold"/>
    </style:style>
    <style:style style:name="P37" style:family="paragraph" style:parent-style-name="Standard">
      <style:text-properties fo:color="#444444" loext:opacity="100%" style:font-name="Arial" fo:font-size="11pt" fo:background-color="#ffff00" style:font-name-asian="Arial2" style:font-size-asian="11pt"/>
    </style:style>
    <style:style style:name="P38" style:family="paragraph" style:parent-style-name="Standard">
      <style:text-properties fo:color="#444444" loext:opacity="100%" style:font-name="Arial" fo:font-size="11pt" fo:font-style="italic" style:font-name-asian="Arial2" style:font-size-asian="11pt" style:font-style-asian="italic"/>
    </style:style>
    <style:style style:name="P39" style:family="paragraph" style:parent-style-name="Standard">
      <style:text-properties fo:color="#ff7f00" loext:opacity="100%" style:font-name="Arial" fo:font-size="13pt" fo:font-weight="bold" style:font-name-asian="Arial2" style:font-size-asian="13pt" style:font-weight-asian="bold"/>
    </style:style>
    <style:style style:name="P40" style:family="paragraph" style:parent-style-name="Standard">
      <style:text-properties fo:color="#ffff00" loext:opacity="100%" style:font-name="Arial" fo:font-size="11pt" fo:font-weight="bold" fo:background-color="#651fff" style:font-name-asian="Arial2" style:font-size-asian="11pt" style:font-weight-asian="bold"/>
    </style:style>
    <style:style style:name="P41" style:family="paragraph" style:parent-style-name="Standard">
      <style:text-properties fo:color="#1f3864" loext:opacity="100%" style:font-name="Courier New" fo:font-size="11pt" fo:font-weight="bold" style:font-name-asian="Courier New1" style:font-size-asian="11pt" style:font-weight-asian="bold"/>
    </style:style>
    <style:style style:name="P42" style:family="paragraph" style:parent-style-name="Standard">
      <style:text-properties fo:color="#1f3864" loext:opacity="100%" style:font-name="Courier New" fo:font-size="10pt" style:font-name-asian="Courier New1" style:font-size-asian="10pt"/>
    </style:style>
    <style:style style:name="P43" style:family="paragraph" style:parent-style-name="Standard">
      <style:text-properties fo:color="#22b14c" loext:opacity="100%" style:font-name="Courier New" fo:font-size="10pt" style:font-name-asian="Courier New1" style:font-size-asian="10pt"/>
    </style:style>
    <style:style style:name="P44" style:family="paragraph" style:parent-style-name="Standard">
      <style:text-properties fo:color="#c00000" loext:opacity="100%" style:font-name="Arial" fo:font-size="11pt" fo:font-weight="bold" style:font-name-asian="Arial2" style:font-size-asian="11pt" style:font-weight-asian="bold"/>
    </style:style>
    <style:style style:name="P45" style:family="paragraph" style:parent-style-name="Standard">
      <style:paragraph-properties fo:margin-left="0.762cm" fo:margin-right="0cm" fo:text-indent="0cm" style:auto-text-indent="false"/>
      <style:text-properties fo:color="#444444" loext:opacity="100%" style:font-name="Arial" fo:font-size="11pt" style:font-name-asian="Arial2" style:font-size-asian="11pt"/>
    </style:style>
    <style:style style:name="P46" style:family="paragraph" style:parent-style-name="Standard">
      <style:text-properties fo:color="#c6ff00" loext:opacity="100%" style:font-name="Arial" fo:font-size="11pt" fo:font-weight="bold" fo:background-color="#f50057" style:font-name-asian="Arial2" style:font-size-asian="11pt" style:font-weight-asian="bold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color="#1f3864" loext:opacity="100%" style:font-name="Courier New" fo:font-size="10pt" style:font-name-asian="Courier New1" style:font-size-asian="10pt"/>
    </style:style>
    <style:style style:name="P48" style:family="paragraph" style:parent-style-name="Standard">
      <style:text-properties fo:color="#1f3864" loext:opacity="100%" style:font-name="Arial" fo:font-size="12pt" fo:font-weight="bold" style:font-name-asian="Arial2" style:font-size-asian="12pt" style:font-weight-asian="bold"/>
    </style:style>
    <style:style style:name="P49" style:family="paragraph" style:parent-style-name="Standard">
      <style:text-properties fo:color="#eeff41" loext:opacity="100%" style:font-name="Arial" fo:font-size="11pt" fo:font-weight="bold" fo:background-color="#ff6e40" style:font-name-asian="Arial2" style:font-size-asian="11pt" style:font-weight-asian="bold" style:font-weight-complex="bold"/>
    </style:style>
    <style:style style:name="P50" style:family="paragraph" style:parent-style-name="Standard">
      <style:text-properties fo:color="#22b14c" loext:opacity="100%" style:font-name="Courier New" fo:font-size="10pt" fo:font-weight="bold" style:font-name-asian="Courier New1" style:font-size-asian="10pt" style:font-weight-asian="bold"/>
    </style:style>
    <style:style style:name="P51" style:family="paragraph" style:parent-style-name="Standard">
      <style:text-properties fo:color="#444444" loext:opacity="100%" style:font-name="Arial" fo:font-size="11pt" fo:font-weight="bold" style:font-name-asian="Arial2" style:font-size-asian="11pt" style:font-weight-asian="bold"/>
    </style:style>
    <style:style style:name="P52" style:family="paragraph" style:parent-style-name="Standard">
      <style:text-properties fo:color="#22b14c" loext:opacity="100%" style:font-name="Arial" fo:font-size="11pt" fo:font-weight="bold" fo:background-color="#ffff00" style:font-name-asian="Arial2" style:font-size-asian="11pt" style:font-weight-asian="bold"/>
    </style:style>
    <style:style style:name="P53" style:family="paragraph" style:parent-style-name="Standard">
      <style:text-properties fo:background-color="#ffff00"/>
    </style:style>
    <style:style style:name="P54" style:family="paragraph" style:parent-style-name="Standard">
      <style:text-properties fo:color="#c00000" loext:opacity="100%" style:font-name="Arial" fo:font-size="11pt" fo:background-color="#ffff00" style:font-name-asian="Arial2" style:font-size-asian="11pt"/>
    </style:style>
    <style:style style:name="P55" style:family="paragraph" style:parent-style-name="Standard">
      <style:paragraph-properties fo:margin-left="0.762cm" fo:margin-right="0cm" fo:text-indent="0cm" style:auto-text-indent="false"/>
      <style:text-properties fo:color="#22b14c" loext:opacity="100%" style:font-name="Arial" fo:font-size="12pt" fo:font-weight="bold" style:font-name-asian="Arial2" style:font-size-asian="12pt" style:font-weight-asian="bold"/>
    </style:style>
    <style:style style:name="P56" style:family="paragraph" style:parent-style-name="Standard">
      <style:text-properties fo:color="#22b14c" loext:opacity="100%" style:font-name="Arial" fo:font-size="12pt" fo:font-weight="bold" style:font-name-asian="Arial2" style:font-size-asian="12pt" style:font-weight-asian="bold"/>
    </style:style>
    <style:style style:name="P57" style:family="paragraph" style:parent-style-name="Heading_20_1">
      <style:paragraph-properties fo:margin-left="0cm" fo:margin-right="0cm" fo:margin-top="0cm" fo:margin-bottom="0.212cm" style:contextual-spacing="false" fo:text-indent="0cm" style:auto-text-indent="false"/>
    </style:style>
    <style:style style:name="P58" style:family="paragraph" style:parent-style-name="Standard">
      <style:paragraph-properties fo:margin-top="0.106cm" fo:margin-bottom="0.035cm" style:contextual-spacing="false"/>
    </style:style>
    <style:style style:name="P59" style:family="paragraph" style:parent-style-name="Standard">
      <style:paragraph-properties fo:margin-top="0.071cm" fo:margin-bottom="0.071cm" style:contextual-spacing="false" fo:text-align="center" style:justify-single-word="false"/>
    </style:style>
    <style:style style:name="P60" style:family="paragraph" style:parent-style-name="Standard">
      <style:paragraph-properties fo:margin-top="0cm" fo:margin-bottom="0.071cm" style:contextual-spacing="false"/>
    </style:style>
    <style:style style:name="T1" style:family="text">
      <style:text-properties fo:color="#ffffff" loext:opacity="100%" style:font-name="Arial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2" style:family="text">
      <style:text-properties fo:color="#ffffff" loext:opacity="100%" style:font-name="Arial" fo:font-size="24pt" fo:font-weight="bold" style:font-size-asian="24pt" style:font-weight-asian="bold" style:font-name-complex="Arial2" style:font-size-complex="24pt" style:font-weight-complex="bold"/>
    </style:style>
    <style:style style:name="T3" style:family="text">
      <style:text-properties fo:color="#ffffff" loext:opacity="100%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4" style:family="text">
      <style:text-properties fo:color="#a8d8dc" loext:opacity="100%" style:font-name="Arial" fo:font-size="12pt" style:font-name-asian="Arial2" style:font-size-asian="12pt" style:font-name-complex="Arial2" style:font-size-complex="12pt"/>
    </style:style>
    <style:style style:name="T5" style:family="text">
      <style:text-properties fo:color="#a8d8dc" loext:opacity="100%" style:font-name="Arial" fo:font-size="12pt" style:font-size-asian="12pt" style:font-name-complex="Arial2" style:font-size-complex="12pt"/>
    </style:style>
    <style:style style:name="T6" style:family="text">
      <style:text-properties fo:color="#a8d8dc" loext:opacity="100%" fo:font-size="12pt" style:font-name-asian="Arial2" style:font-size-asian="12pt" style:font-name-complex="Arial2" style:font-size-complex="12pt"/>
    </style:style>
    <style:style style:name="T7" style:family="text">
      <style:text-properties fo:color="#1f3864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T8" style:family="text">
      <style:text-properties fo:color="#1f3864" loext:opacity="100%" style:font-name="Arial" fo:font-size="18pt" fo:font-weight="bold" style:font-size-asian="18pt" style:font-weight-asian="bold" style:font-name-complex="Arial2" style:font-size-complex="18pt" style:font-weight-complex="bold"/>
    </style:style>
    <style:style style:name="T9" style:family="text">
      <style:text-properties fo:color="#1a6b72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10" style:family="text">
      <style:text-properties fo:color="#1a6b72" loext:opacity="100%" style:font-name="Arial" fo:font-size="14pt" fo:font-weight="bold" style:font-size-asian="14pt" style:font-weight-asian="bold" style:font-name-complex="Arial2" style:font-size-complex="14pt" style:font-weight-complex="bold"/>
    </style:style>
    <style:style style:name="T11" style:family="text">
      <style:text-properties fo:color="#444444" loext:opacity="100%" style:font-name="Arial" fo:font-size="11pt" style:font-name-asian="Arial2" style:font-size-asian="11pt" style:font-name-complex="Arial2" style:font-size-complex="11pt"/>
    </style:style>
    <style:style style:name="T12" style:family="text">
      <style:text-properties fo:color="#444444" loext:opacity="100%" style:font-name="Arial" fo:font-size="11pt" style:font-size-asian="11pt" style:font-name-complex="Arial2" style:font-size-complex="11pt"/>
    </style:style>
    <style:style style:name="T13" style:family="text">
      <style:text-properties fo:color="#1a6b7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4" style:family="text">
      <style:text-properties fo:color="#1a6b72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15" style:family="text">
      <style:text-properties fo:color="#444444" loext:opacity="100%" fo:font-size="11pt" style:font-name-asian="Arial2" style:font-size-asian="11pt" style:font-name-complex="Arial2" style:font-size-complex="11pt"/>
    </style:style>
    <style:style style:name="T16" style:family="text">
      <style:text-properties fo:color="#c9211e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7" style:family="text">
      <style:text-properties fo:color="#c9211e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8" style:family="text">
      <style:text-properties fo:color="#ff3d00" loext:opacity="100%" style:font-name="Arial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19" style:family="text">
      <style:text-properties fo:color="#ff3d00" loext:opacity="100%" fo:font-size="11pt" fo:font-weight="bold" fo:background-color="#64ffda" loext:char-shading-value="0" style:font-name-asian="Arial2" style:font-size-asian="11pt" style:font-weight-asian="bold" style:font-name-complex="Arial2" style:font-size-complex="11pt" style:font-weight-complex="bold"/>
    </style:style>
    <style:style style:name="T20" style:family="text">
      <style:text-properties fo:color="#18ffff" loext:opacity="100%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21" style:family="text">
      <style:text-properties fo:color="#e040fb" loext:opacity="100%" style:font-name="Arial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22" style:family="text">
      <style:text-properties fo:color="#e040fb" loext:opacity="100%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23" style:family="text">
      <style:text-properties fo:color="#7b3f00" loext:opacity="100%" style:font-name="Arial" fo:font-size="11pt" style:font-name-asian="Arial2" style:font-size-asian="11pt" style:font-name-complex="Arial2" style:font-size-complex="11pt"/>
    </style:style>
    <style:style style:name="T24" style:family="text">
      <style:text-properties fo:color="#7b3f00" loext:opacity="100%" fo:font-size="11pt" style:font-name-asian="Arial2" style:font-size-asian="11pt" style:font-name-complex="Arial2" style:font-size-complex="11pt"/>
    </style:style>
    <style:style style:name="T25" style:family="text">
      <style:text-properties fo:color="#7b3f00" loext:opacity="100%" style:font-name="Arial" fo:font-size="11pt" style:font-size-asian="11pt" style:font-name-complex="Arial2" style:font-size-complex="11pt"/>
    </style:style>
    <style:style style:name="T26" style:family="text"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T27" style:family="text"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T28" style:family="text">
      <style:text-properties fo:color="#1a6b72" loext:opacity="100%" style:font-name="Arial" fo:font-size="10pt" style:font-name-asian="Arial2" style:font-size-asian="10pt" style:font-name-complex="Arial2" style:font-size-complex="10pt"/>
    </style:style>
    <style:style style:name="T29" style:family="text">
      <style:text-properties fo:color="#ff1744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30" style:family="text">
      <style:text-properties fo:color="#ff1744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31" style:family="text">
      <style:text-properties fo:color="#1a6b72" loext:opacity="100%" style:font-name="Arial" fo:font-size="10pt" style:font-size-asian="10pt" style:font-name-complex="Arial2" style:font-size-complex="10pt"/>
    </style:style>
    <style:style style:name="T32" style:family="text">
      <style:text-properties fo:color="#ff3d00" loext:opacity="100%" fo:font-size="10pt" fo:font-weight="bold" fo:background-color="#64ffda" loext:char-shading-value="0" style:font-name-asian="Arial2" style:font-size-asian="10pt" style:font-weight-asian="bold" style:font-name-complex="Arial2" style:font-size-complex="10pt" style:font-weight-complex="bold"/>
    </style:style>
    <style:style style:name="T33" style:family="text">
      <style:text-properties fo:color="#ff3d00" loext:opacity="100%" style:font-name="Arial" fo:font-size="10pt" fo:font-weight="bold" fo:background-color="#64ffda" loext:char-shading-value="0" style:font-size-asian="10pt" style:font-weight-asian="bold" style:font-name-complex="Arial2" style:font-size-complex="10pt" style:font-weight-complex="bold"/>
    </style:style>
    <style:style style:name="T34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35" style:family="text">
      <style:text-properties fo:color="#ffffff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36" style:family="text">
      <style:text-properties fo:color="#1e5631" loext:opacity="100%" style:font-name="Arial" fo:font-size="10pt" style:font-name-asian="Arial2" style:font-size-asian="10pt" style:font-name-complex="Arial2" style:font-size-complex="10pt"/>
    </style:style>
    <style:style style:name="T37" style:family="text">
      <style:text-properties fo:color="#1e5631" loext:opacity="100%" fo:font-size="10pt" style:font-name-asian="Arial2" style:font-size-asian="10pt" style:font-name-complex="Arial2" style:font-size-complex="10pt"/>
    </style:style>
    <style:style style:name="T38" style:family="text">
      <style:text-properties fo:color="#1e5631" loext:opacity="100%" style:font-name="Arial" fo:font-size="10pt" style:font-size-asian="10pt" style:font-name-complex="Arial2" style:font-size-complex="10pt"/>
    </style:style>
    <style:style style:name="T39" style:family="text">
      <style:text-properties fo:color="#ffd740" loext:opacity="100%" style:font-name="Arial" fo:font-size="10pt" fo:font-weight="bold" fo:background-color="#ff1744" loext:char-shading-value="0" style:font-size-asian="10pt" style:font-weight-asian="bold" style:font-name-complex="Arial2" style:font-size-complex="10pt" style:font-weight-complex="bold"/>
    </style:style>
    <style:style style:name="T40" style:family="text">
      <style:text-properties fo:color="#ffff00" loext:opacity="100%" style:font-name="Arial" fo:font-size="10pt" fo:font-weight="bold" fo:background-color="#ff9100" loext:char-shading-value="0" style:font-name-asian="Arial2" style:font-size-asian="10pt" style:font-weight-asian="bold" style:font-name-complex="Arial2" style:font-size-complex="10pt" style:font-weight-complex="bold"/>
    </style:style>
    <style:style style:name="T41" style:family="text">
      <style:text-properties fo:color="#ffff00" loext:opacity="100%" style:font-name="Arial" fo:font-size="10pt" fo:font-weight="bold" fo:background-color="#ff9100" loext:char-shading-value="0" style:font-size-asian="10pt" style:font-weight-asian="bold" style:font-name-complex="Arial2" style:font-size-complex="10pt" style:font-weight-complex="bold"/>
    </style:style>
    <style:style style:name="T42" style:family="text">
      <style:text-properties fo:color="#18ffff" loext:opacity="100%" fo:font-size="10pt" fo:font-weight="bold" fo:background-color="#e040fb" loext:char-shading-value="0" style:font-name-asian="Arial2" style:font-size-asian="10pt" style:font-weight-asian="bold" style:font-name-complex="Arial2" style:font-size-complex="10pt" style:font-weight-complex="bold"/>
    </style:style>
    <style:style style:name="T43" style:family="text">
      <style:text-properties fo:color="#7b3f00" loext:opacity="100%" style:font-name="Arial" fo:font-size="10pt" style:font-name-asian="Arial2" style:font-size-asian="10pt" style:font-name-complex="Arial2" style:font-size-complex="10pt"/>
    </style:style>
    <style:style style:name="T44" style:family="text">
      <style:text-properties fo:color="#7b3f00" loext:opacity="100%" fo:font-size="10pt" style:font-name-asian="Arial2" style:font-size-asian="10pt" style:font-name-complex="Arial2" style:font-size-complex="10pt"/>
    </style:style>
    <style:style style:name="T45" style:family="text">
      <style:text-properties fo:color="#7b3f00" loext:opacity="100%" style:font-name="Arial" fo:font-size="10pt" style:font-size-asian="10pt" style:font-name-complex="Arial2" style:font-size-complex="10pt"/>
    </style:style>
    <style:style style:name="T46" style:family="text">
      <style:text-properties fo:color="#76ff03" loext:opacity="100%" style:font-name="Arial" fo:font-size="10pt" fo:font-weight="bold" fo:background-color="#ff9100" loext:char-shading-value="0" style:font-name-asian="Arial2" style:font-size-asian="10pt" style:font-weight-asian="bold" style:font-name-complex="Arial2" style:font-size-complex="10pt" style:font-weight-complex="bold"/>
    </style:style>
    <style:style style:name="T47" style:family="text">
      <style:text-properties fo:color="#76ff03" loext:opacity="100%" style:font-name="Arial" fo:font-size="10pt" fo:font-weight="bold" fo:background-color="#ff9100" loext:char-shading-value="0" style:font-size-asian="10pt" style:font-weight-asian="bold" style:font-name-complex="Arial2" style:font-size-complex="10pt" style:font-weight-complex="bold"/>
    </style:style>
    <style:style style:name="T48" style:family="text">
      <style:text-properties fo:color="#1a6b72" loext:opacity="100%" fo:font-size="10pt" style:font-name-asian="Arial2" style:font-size-asian="10pt" style:font-name-complex="Arial2" style:font-size-complex="10pt"/>
    </style:style>
    <style:style style:name="T49" style:family="text">
      <style:text-properties fo:color="#18ffff" loext:opacity="100%" style:font-name="Arial" fo:font-size="10pt" fo:font-weight="bold" fo:background-color="#ff9100" loext:char-shading-value="0" style:font-name-asian="Arial2" style:font-size-asian="10pt" style:font-weight-asian="bold" style:font-name-complex="Arial2" style:font-size-complex="10pt" style:font-weight-complex="bold"/>
    </style:style>
    <style:style style:name="T50" style:family="text">
      <style:text-properties fo:color="#18ffff" loext:opacity="100%" style:font-name="Arial" fo:font-size="10pt" fo:font-weight="bold" fo:background-color="#ff9100" loext:char-shading-value="0" style:font-size-asian="10pt" style:font-weight-asian="bold" style:font-name-complex="Arial2" style:font-size-complex="10pt" style:font-weight-complex="bold"/>
    </style:style>
    <style:style style:name="T51" style:family="text">
      <style:text-properties fo:color="#1e5631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52" style:family="text">
      <style:text-properties fo:color="#1e5631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53" style:family="text">
      <style:text-properties fo:color="#1e5631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54" style:family="text">
      <style:text-properties fo:color="#7b3f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55" style:family="text">
      <style:text-properties fo:color="#7b3f00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56" style:family="text">
      <style:text-properties fo:color="#7b3f00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57" style:family="text">
      <style:text-properties fo:color="#1a6b72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58" style:family="text">
      <style:text-properties fo:color="#8b0000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59" style:family="text">
      <style:text-properties fo:color="#8b0000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60" style:family="text">
      <style:text-properties fo:color="#8b0000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61" style:family="text">
      <style:text-properties fo:color="#8b0000" loext:opacity="100%" style:font-name="Courier New" fo:font-size="11pt" style:font-name-asian="Courier New1" style:font-size-asian="11pt" style:font-name-complex="Courier New1" style:font-size-complex="11pt"/>
    </style:style>
    <style:style style:name="T62" style:family="text">
      <style:text-properties fo:color="#1e5631" loext:opacity="100%" style:font-name="Courier New" fo:font-size="11pt" style:font-name-asian="Courier New1" style:font-size-asian="11pt" style:font-name-complex="Courier New1" style:font-size-complex="11pt"/>
    </style:style>
    <style:style style:name="T63" style:family="text">
      <style:text-properties fo:color="#18ffff" loext:opacity="100%" style:font-name="Arial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64" style:family="text">
      <style:text-properties fo:color="#1f3864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65" style:family="text">
      <style:text-properties fo:color="#1f3864" loext:opacity="100%" style:font-name="Arial" fo:font-size="13pt" fo:font-weight="bold" style:font-size-asian="13pt" style:font-weight-asian="bold" style:font-name-complex="Arial2" style:font-size-complex="13pt" style:font-weight-complex="bold"/>
    </style:style>
    <style:style style:name="T66" style:family="text">
      <style:text-properties fo:color="#eeff41" loext:opacity="100%" style:font-name="Arial" fo:font-size="13pt" fo:font-weight="bold" fo:background-color="#3d5afe" loext:char-shading-value="0" style:font-size-asian="13pt" style:font-weight-asian="bold" style:font-name-complex="Arial2" style:font-size-complex="13pt" style:font-weight-complex="bold"/>
    </style:style>
    <style:style style:name="T67" style:family="text">
      <style:text-properties fo:color="#ff3d00" loext:opacity="100%" style:font-name="Arial" fo:font-size="13pt" fo:font-weight="bold" fo:background-color="#64ffda" loext:char-shading-value="0" style:font-size-asian="13pt" style:font-weight-asian="bold" style:font-name-complex="Arial2" style:font-size-complex="13pt" style:font-weight-complex="bold"/>
    </style:style>
    <style:style style:name="T68" style:family="text">
      <style:text-properties fo:color="#1a6b72" loext:opacity="100%" style:font-name="Arial" fo:font-size="14pt" fo:font-weight="bold" fo:background-color="#ffff00" loext:char-shading-value="0" style:font-name-asian="Arial2" style:font-size-asian="14pt" style:font-weight-asian="bold" style:font-name-complex="Arial2" style:font-size-complex="14pt" style:font-weight-complex="bold"/>
    </style:style>
    <style:style style:name="T69" style:family="text">
      <style:text-properties fo:color="#1a6b72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70" style:family="text">
      <style:text-properties fo:color="#1a6b72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71" style:family="text">
      <style:text-properties fo:color="#1a6b72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72" style:family="text">
      <style:text-properties fo:color="#444444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73" style:family="text">
      <style:text-properties fo:color="#18ffff" loext:opacity="100%" style:font-name="Arial" fo:font-size="10pt" fo:font-weight="bold" fo:background-color="#d500f9" loext:char-shading-value="0" style:font-size-asian="10pt" style:font-weight-asian="bold" style:font-name-complex="Arial2" style:font-size-complex="10pt" style:font-weight-complex="bold"/>
    </style:style>
    <style:style style:name="T74" style:family="text">
      <style:text-properties fo:color="#444444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75" style:family="text">
      <style:text-properties fo:color="#ff4081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76" style:family="text">
      <style:text-properties fo:color="#444444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77" style:family="text">
      <style:text-properties fo:color="#00e676" loext:opacity="100%" style:font-name="Courier New" fo:font-size="10pt" fo:font-weight="bold" fo:background-color="#5d4037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78" style:family="text">
      <style:text-properties fo:color="#ffff00" loext:opacity="100%" style:font-name="Arial" fo:font-size="10pt" fo:font-weight="bold" fo:background-color="#ff4081" loext:char-shading-value="0" style:font-name-asian="Arial2" style:font-size-asian="10pt" style:font-weight-asian="bold" style:font-name-complex="Arial2" style:font-size-complex="10pt" style:font-weight-complex="bold"/>
    </style:style>
    <style:style style:name="T79" style:family="text">
      <style:text-properties fo:color="#ffff00" loext:opacity="100%" style:font-name="Arial" fo:font-size="10pt" fo:font-weight="bold" fo:background-color="#ff4081" loext:char-shading-value="0" style:font-size-asian="10pt" style:font-weight-asian="bold" style:font-name-complex="Arial2" style:font-size-complex="10pt" style:font-weight-complex="bold"/>
    </style:style>
    <style:style style:name="T80" style:family="text">
      <style:text-properties fo:color="#ff3d00" loext:opacity="100%" style:font-name="Courier New" fo:font-size="10pt" fo:font-weight="bold" fo:background-color="#64ffda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81" style:family="text">
      <style:text-properties fo:color="#eeeeee" loext:opacity="100%" style:font-name="Arial" fo:font-size="10pt" fo:font-weight="bold" fo:background-color="#ff4081" loext:char-shading-value="0" style:font-name-asian="Arial2" style:font-size-asian="10pt" style:font-weight-asian="bold" style:font-name-complex="Arial2" style:font-size-complex="10pt" style:font-weight-complex="bold"/>
    </style:style>
    <style:style style:name="T82" style:family="text">
      <style:text-properties fo:color="#eeeeee" loext:opacity="100%" style:font-name="Arial" fo:font-size="10pt" fo:font-weight="bold" fo:background-color="#ff4081" loext:char-shading-value="0" style:font-size-asian="10pt" style:font-weight-asian="bold" style:font-name-complex="Arial2" style:font-size-complex="10pt" style:font-weight-complex="bold"/>
    </style:style>
    <style:style style:name="T83" style:family="text">
      <style:text-properties fo:color="#444444" loext:opacity="100%" style:font-name="Courier New" fo:font-size="10pt" fo:font-weight="bold" fo:background-color="#ffff0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84" style:family="text">
      <style:text-properties fo:color="#ffc400" loext:opacity="100%" style:font-name="Courier New" fo:font-size="10pt" fo:font-weight="bold" fo:background-color="#00000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85" style:family="text">
      <style:text-properties fo:color="#444444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86" style:family="text">
      <style:text-properties fo:color="#7b3f00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87" style:family="text">
      <style:text-properties fo:color="#7b3f00" loext:opacity="100%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88" style:family="text">
      <style:text-properties fo:color="#7b3f00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89" style:family="text"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T90" style:family="text">
      <style:text-properties fo:color="#444444" loext:opacity="100%" style:font-name="Arial" fo:font-size="10pt" style:font-name-asian="Arial2" style:font-size-asian="10pt" style:font-name-complex="Arial2" style:font-size-complex="10pt"/>
    </style:style>
    <style:style style:name="T91" style:family="text">
      <style:text-properties fo:color="#444444" loext:opacity="100%" fo:font-size="10pt" style:font-name-asian="Arial2" style:font-size-asian="10pt" style:font-name-complex="Arial2" style:font-size-complex="10pt"/>
    </style:style>
    <style:style style:name="T92" style:family="text">
      <style:text-properties fo:color="#444444" loext:opacity="100%" style:font-name="Arial" fo:font-size="10pt" style:font-size-asian="10pt" style:font-name-complex="Arial2" style:font-size-complex="10pt"/>
    </style:style>
    <style:style style:name="T93" style:family="text">
      <style:text-properties fo:color="#1f3864" loext:opacity="100%" style:font-name="Arial" fo:font-size="18pt" fo:font-weight="bold" fo:background-color="#ffd740" loext:char-shading-value="0" style:font-name-asian="Arial2" style:font-size-asian="18pt" style:font-weight-asian="bold" style:font-name-complex="Arial2" style:font-size-complex="18pt" style:font-weight-complex="bold"/>
    </style:style>
    <style:style style:name="T94" style:family="text">
      <style:text-properties fo:color="#1f3864" loext:opacity="100%" style:font-name="Arial" fo:font-size="18pt" fo:font-weight="bold" fo:background-color="#ffd740" loext:char-shading-value="0" style:font-size-asian="18pt" style:font-weight-asian="bold" style:font-name-complex="Arial2" style:font-size-complex="18pt" style:font-weight-complex="bold"/>
    </style:style>
    <style:style style:name="T95" style:family="text">
      <style:text-properties fo:color="#444444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96" style:family="text">
      <style:text-properties fo:color="#444444" loext:opacity="100%" style:font-name="Arial" fo:font-size="11pt" fo:font-weight="bold" fo:background-color="#ffd740" loext:char-shading-value="0" style:font-size-asian="11pt" style:font-weight-asian="bold" style:font-name-complex="Arial2" style:font-size-complex="11pt" style:font-weight-complex="bold"/>
    </style:style>
    <style:style style:name="T97" style:family="text">
      <style:text-properties fo:color="#18ffff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98" style:family="text">
      <style:text-properties fo:color="#1f38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99" style:family="text">
      <style:text-properties fo:color="#1f3864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00" style:family="text">
      <style:text-properties fo:color="#1f3864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101" style:family="text">
      <style:text-properties fo:color="#444444" loext:opacity="100%" fo:font-size="11pt" fo:font-weight="bold" fo:background-color="#ffd740" loext:char-shading-value="0" style:font-name-asian="Arial2" style:font-size-asian="11pt" style:font-weight-asian="bold" style:font-name-complex="Arial2" style:font-size-complex="11pt" style:font-weight-complex="bold"/>
    </style:style>
    <style:style style:name="T102" style:family="text">
      <style:text-properties fo:color="#18ffff" loext:opacity="100%" style:font-name="Arial" fo:font-size="11pt" fo:font-weight="bold" fo:background-color="#ff4081" loext:char-shading-value="0" style:font-size-asian="11pt" style:font-weight-asian="bold" style:font-name-complex="Arial2" style:font-size-complex="11pt" style:font-weight-complex="bold"/>
    </style:style>
    <style:style style:name="T103" style:family="text">
      <style:text-properties fo:color="#18ffff" loext:opacity="100%" fo:font-size="11pt" fo:font-weight="bold" fo:background-color="#ff4081" loext:char-shading-value="0" style:font-name-asian="Arial2" style:font-size-asian="11pt" style:font-weight-asian="bold" style:font-name-complex="Arial2" style:font-size-complex="11pt" style:font-weight-complex="bold"/>
    </style:style>
    <style:style style:name="T104" style:family="text">
      <style:text-properties fo:color="#444444" loext:opacity="100%" style:font-name="Arial" fo:font-size="11pt" fo:font-weight="bold" fo:background-color="#c6ff00" loext:char-shading-value="0" style:font-size-asian="11pt" style:font-weight-asian="bold" style:font-name-complex="Arial2" style:font-size-complex="11pt" style:font-weight-complex="bold"/>
    </style:style>
    <style:style style:name="T105" style:family="text">
      <style:text-properties fo:color="#444444" loext:opacity="100%" fo:font-size="11pt" fo:font-weight="bold" fo:background-color="#c6ff00" loext:char-shading-value="0" style:font-name-asian="Arial2" style:font-size-asian="11pt" style:font-weight-asian="bold" style:font-name-complex="Arial2" style:font-size-complex="11pt" style:font-weight-complex="bold"/>
    </style:style>
    <style:style style:name="T106" style:family="text">
      <style:text-properties fo:color="#8b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07" style:family="text">
      <style:text-properties fo:color="#8b0000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08" style:family="text">
      <style:text-properties fo:color="#ffff00" loext:opacity="100%" style:font-name="Arial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109" style:family="text">
      <style:text-properties fo:color="#ffff00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110" style:family="text">
      <style:text-properties fo:color="#ff5252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111" style:family="text">
      <style:text-properties fo:color="#ff5252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12" style:family="text">
      <style:text-properties fo:color="#76ff03" loext:opacity="100%" style:font-name="Arial" fo:font-size="10pt" fo:font-weight="bold" fo:background-color="#3d5afe" loext:char-shading-value="0" style:font-size-asian="10pt" style:font-weight-asian="bold" style:font-name-complex="Arial2" style:font-size-complex="10pt" style:font-weight-complex="bold"/>
    </style:style>
    <style:style style:name="T113" style:family="text">
      <style:text-properties fo:color="#76ff03" loext:opacity="100%" fo:font-size="10pt" fo:font-weight="bold" fo:background-color="#3d5afe" loext:char-shading-value="0" style:font-name-asian="Arial2" style:font-size-asian="10pt" style:font-weight-asian="bold" style:font-name-complex="Arial2" style:font-size-complex="10pt" style:font-weight-complex="bold"/>
    </style:style>
    <style:style style:name="T114" style:family="text">
      <style:text-properties fo:color="#c6ff00" loext:opacity="100%" style:font-name="Arial" fo:font-size="10pt" fo:font-weight="bold" fo:background-color="#651fff" loext:char-shading-value="0" style:font-size-asian="10pt" style:font-weight-asian="bold" style:font-name-complex="Arial2" style:font-size-complex="10pt" style:font-weight-complex="bold"/>
    </style:style>
    <style:style style:name="T115" style:family="text">
      <style:text-properties fo:color="#c6ff00" loext:opacity="100%" fo:font-size="10pt" fo:font-weight="bold" fo:background-color="#651fff" loext:char-shading-value="0" style:font-name-asian="Arial2" style:font-size-asian="10pt" style:font-weight-asian="bold" style:font-name-complex="Arial2" style:font-size-complex="10pt" style:font-weight-complex="bold"/>
    </style:style>
    <style:style style:name="T116" style:family="text">
      <style:text-properties fo:color="#ffffff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17" style:family="text">
      <style:text-properties fo:color="#ffffff" loext:opacity="100%" style:font-name="Arial" fo:font-size="9pt" fo:font-weight="bold" style:font-size-asian="9pt" style:font-weight-asian="bold" style:font-name-complex="Arial2" style:font-size-complex="9pt" style:font-weight-complex="bold"/>
    </style:style>
    <style:style style:name="T118" style:family="text">
      <style:text-properties fo:color="#ffffff" loext:opacity="100%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19" style:family="text">
      <style:text-properties fo:color="#444444" loext:opacity="100%" style:font-name="Arial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T120" style:family="text">
      <style:text-properties fo:color="#444444" loext:opacity="100%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T121" style:family="text">
      <style:text-properties fo:color="#444444" loext:opacity="100%" style:font-name="Arial" fo:font-size="9pt" fo:font-weight="normal" style:font-size-asian="9pt" style:font-weight-asian="normal" style:font-name-complex="Arial2" style:font-size-complex="9pt" style:font-weight-complex="normal"/>
    </style:style>
    <style:style style:name="T122" style:family="text">
      <style:text-properties fo:color="#76ff03" loext:opacity="100%" fo:font-size="9pt" fo:font-weight="bold" fo:background-color="#3d5afe" loext:char-shading-value="0" style:font-name-asian="Arial2" style:font-size-asian="9pt" style:font-weight-asian="bold" style:font-name-complex="Arial2" style:font-size-complex="9pt" style:font-weight-complex="bold"/>
    </style:style>
    <style:style style:name="T123" style:family="text">
      <style:text-properties fo:color="#f50057" loext:opacity="100%" style:font-name="Arial" fo:font-size="9pt" fo:font-weight="bold" fo:background-color="#ffff00" loext:char-shading-value="0" style:font-size-asian="9pt" style:font-weight-asian="bold" style:font-name-complex="Arial2" style:font-size-complex="9pt" style:font-weight-complex="bold"/>
    </style:style>
    <style:style style:name="T124" style:family="text">
      <style:text-properties fo:color="#f50057" loext:opacity="100%" fo:font-size="9pt" fo:font-weight="bold" fo:background-color="#ffff00" loext:char-shading-value="0" style:font-name-asian="Arial2" style:font-size-asian="9pt" style:font-weight-asian="bold" style:font-name-complex="Arial2" style:font-size-complex="9pt" style:font-weight-complex="bold"/>
    </style:style>
    <style:style style:name="T125" style:family="text">
      <style:text-properties fo:color="#1e5631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26" style:family="text">
      <style:text-properties fo:color="#1e5631" loext:opacity="100%" style:font-name="Arial" fo:font-size="9pt" fo:font-weight="bold" style:font-size-asian="9pt" style:font-weight-asian="bold" style:font-name-complex="Arial2" style:font-size-complex="9pt" style:font-weight-complex="bold"/>
    </style:style>
    <style:style style:name="T127" style:family="text">
      <style:text-properties fo:color="#1e5631" loext:opacity="100%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28" style:family="text">
      <style:text-properties fo:color="#ff3d00" loext:opacity="100%" fo:font-size="9pt" fo:font-weight="bold" fo:background-color="#64ffda" loext:char-shading-value="0" style:font-name-asian="Arial2" style:font-size-asian="9pt" style:font-weight-asian="bold" style:font-name-complex="Arial2" style:font-size-complex="9pt" style:font-weight-complex="bold"/>
    </style:style>
    <style:style style:name="T129" style:family="text">
      <style:text-properties fo:color="#444444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30" style:family="text"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T131" style:family="text">
      <style:text-properties fo:color="#444444" loext:opacity="100%" style:font-name="Arial" fo:font-size="10pt" fo:font-weight="bold" fo:background-color="#ffd740" loext:char-shading-value="0" style:font-name-asian="Arial2" style:font-size-asian="10pt" style:font-weight-asian="bold" style:font-name-complex="Arial2" style:font-size-complex="10pt" style:font-weight-complex="bold"/>
    </style:style>
    <style:style style:name="T132" style:family="text">
      <style:text-properties fo:color="#444444" loext:opacity="100%" fo:font-size="10pt" fo:font-weight="bold" fo:background-color="#ffd740" loext:char-shading-value="0" style:font-name-asian="Arial2" style:font-size-asian="10pt" style:font-weight-asian="bold" style:font-name-complex="Arial2" style:font-size-complex="10pt" style:font-weight-complex="bold"/>
    </style:style>
    <style:style style:name="T133" style:family="text">
      <style:text-properties fo:color="#7b3f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34" style:family="text">
      <style:text-properties fo:color="#7b3f0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35" style:family="text">
      <style:text-properties fo:color="#7b3f0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36" style:family="text">
      <style:text-properties fo:color="#444444" loext:opacity="100%" style:font-name="Arial" fo:font-size="10pt" fo:font-weight="bold" fo:background-color="#ffd740" loext:char-shading-value="0" style:font-size-asian="10pt" style:font-weight-asian="bold" style:font-name-complex="Arial2" style:font-size-complex="10pt" style:font-weight-complex="bold"/>
    </style:style>
    <style:style style:name="T137" style:family="text">
      <style:text-properties fo:color="#18ffff" loext:opacity="100%" style:font-name="Arial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138" style:family="text">
      <style:text-properties fo:color="#18ffff" loext:opacity="100%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139" style:family="text">
      <style:text-properties fo:color="#444444" loext:opacity="100%" style:font-name="Arial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140" style:family="text">
      <style:text-properties fo:color="#444444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141" style:family="text">
      <style:text-properties fo:color="#444444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42" style:family="text">
      <style:text-properties fo:color="#76ff03" loext:opacity="100%" style:font-name="Arial" fo:font-size="10pt" fo:font-weight="bold" fo:background-color="#3d5afe" loext:char-shading-value="0" style:font-name-asian="Arial2" style:font-size-asian="10pt" style:font-weight-asian="bold" style:font-name-complex="Arial2" style:font-size-complex="10pt" style:font-weight-complex="bold"/>
    </style:style>
    <style:style style:name="T143" style:family="text">
      <style:text-properties fo:color="#ff3d00" loext:opacity="100%" style:font-name="Arial" fo:font-size="10pt" fo:font-weight="bold" fo:background-color="#64ffda" loext:char-shading-value="0" style:font-name-asian="Arial2" style:font-size-asian="10pt" style:font-weight-asian="bold" style:font-name-complex="Arial2" style:font-size-complex="10pt" style:font-weight-complex="bold"/>
    </style:style>
    <style:style style:name="T144" style:family="text">
      <style:text-properties fo:color="#ff4081" loext:opacity="100%" style:font-name="Arial" fo:font-size="11pt" fo:font-weight="bold" fo:background-color="#ffffff" loext:char-shading-value="0" style:font-size-asian="11pt" style:font-weight-asian="bold" style:font-name-complex="Arial2" style:font-size-complex="11pt" style:font-weight-complex="bold"/>
    </style:style>
    <style:style style:name="T145" style:family="text">
      <style:text-properties fo:color="#ff3d00" loext:opacity="100%" style:font-name="Arial" fo:font-size="11pt" fo:font-weight="bold" fo:background-color="#651fff" loext:char-shading-value="0" style:font-size-asian="11pt" style:font-weight-asian="bold" style:font-name-complex="Arial2" style:font-size-complex="11pt" style:font-weight-complex="bold"/>
    </style:style>
    <style:style style:name="T146" style:family="text">
      <style:text-properties fo:color="#ff3d00" loext:opacity="100%" fo:font-size="11pt" fo:font-weight="bold" fo:background-color="#651fff" loext:char-shading-value="0" style:font-name-asian="Arial2" style:font-size-asian="11pt" style:font-weight-asian="bold" style:font-name-complex="Arial2" style:font-size-complex="11pt" style:font-weight-complex="bold"/>
    </style:style>
    <style:style style:name="T147" style:family="text">
      <style:text-properties fo:color="#ff9100" loext:opacity="100%" style:font-name="Arial" fo:font-size="11pt" fo:font-weight="bold" fo:background-color="#651fff" loext:char-shading-value="0" style:font-size-asian="11pt" style:font-weight-asian="bold" style:font-name-complex="Arial2" style:font-size-complex="11pt" style:font-weight-complex="bold"/>
    </style:style>
    <style:style style:name="T148" style:family="text">
      <style:text-properties fo:color="#ff9100" loext:opacity="100%" fo:font-size="11pt" fo:font-weight="bold" fo:background-color="#651fff" loext:char-shading-value="0" style:font-name-asian="Arial2" style:font-size-asian="11pt" style:font-weight-asian="bold" style:font-name-complex="Arial2" style:font-size-complex="11pt" style:font-weight-complex="bold"/>
    </style:style>
    <style:style style:name="T149" style:family="text">
      <style:text-properties fo:color="#b2ff59" loext:opacity="100%" style:font-name="Arial" fo:font-size="11pt" fo:font-weight="bold" fo:background-color="#ff4081" loext:char-shading-value="0" style:font-size-asian="11pt" style:font-weight-asian="bold" style:font-name-complex="Arial2" style:font-size-complex="11pt" style:font-weight-complex="bold"/>
    </style:style>
    <style:style style:name="T150" style:family="text">
      <style:text-properties fo:color="#b2ff59" loext:opacity="100%" fo:font-size="11pt" fo:font-weight="bold" fo:background-color="#ff4081" loext:char-shading-value="0" style:font-name-asian="Arial2" style:font-size-asian="11pt" style:font-weight-asian="bold" style:font-name-complex="Arial2" style:font-size-complex="11pt" style:font-weight-complex="bold"/>
    </style:style>
    <style:style style:name="T151" style:family="text">
      <style:text-properties fo:color="#ffd740" loext:opacity="100%" style:font-name="Arial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152" style:family="text">
      <style:text-properties fo:color="#ff9100" loext:opacity="100%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153" style:family="text">
      <style:text-properties fo:color="#ff9100" loext:opacity="100%" style:font-name="Arial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54" style:family="text">
      <style:text-properties fo:color="#ff4081" loext:opacity="100%" fo:font-size="11pt" fo:font-weight="bold" fo:background-color="#ffffff" loext:char-shading-value="0" style:font-name-asian="Arial2" style:font-size-asian="11pt" style:font-weight-asian="bold" style:font-name-complex="Arial2" style:font-size-complex="11pt" style:font-weight-complex="bold"/>
    </style:style>
    <style:style style:name="T155" style:family="text">
      <style:text-properties fo:color="#7b3f00" loext:opacity="100%" fo:font-size="12pt" fo:font-weight="bold" fo:background-color="#ffd740" loext:char-shading-value="0" style:font-name-asian="Arial2" style:font-size-asian="12pt" style:font-weight-asian="bold" style:font-name-complex="Arial2" style:font-size-complex="12pt" style:font-weight-complex="bold"/>
    </style:style>
    <style:style style:name="T156" style:family="text">
      <style:text-properties fo:color="#444444" loext:opacity="100%" style:font-name="Courier New" fo:font-size="9pt" style:font-name-asian="Courier New1" style:font-size-asian="9pt" style:font-name-complex="Courier New1" style:font-size-complex="9pt"/>
    </style:style>
    <style:style style:name="T157" style:family="text">
      <style:text-properties fo:color="#444444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58" style:family="text">
      <style:text-properties fo:color="#ff3d00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59" style:family="text">
      <style:text-properties fo:color="#18ffff" loext:opacity="100%" style:font-name="Courier New" fo:font-size="9pt" fo:font-weight="bold" fo:background-color="#d500f9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60" style:family="text">
      <style:text-properties fo:color="#b2ff59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61" style:family="text">
      <style:text-properties fo:color="#1e5631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T162" style:family="text">
      <style:text-properties fo:color="#ffff00" loext:opacity="100%" style:font-name="Courier New" fo:font-size="11pt" fo:font-weight="bold" fo:background-color="#ef5350" loext:char-shading-value="0" style:font-name-asian="Courier New1" style:font-size-asian="11pt" style:font-weight-asian="bold" style:font-name-complex="Courier New1" style:font-size-complex="11pt" style:font-weight-complex="bold"/>
    </style:style>
    <style:style style:name="T163" style:family="text">
      <style:text-properties fo:color="#444444" loext:opacity="100%" style:font-name="Courier New" fo:font-size="9pt" fo:font-weight="bold" fo:background-color="#ffd74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64" style:family="text">
      <style:text-properties fo:color="#00e676" loext:opacity="100%" style:font-name="Courier New" fo:font-size="9pt" fo:font-weight="bold" fo:background-color="#5d403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65" style:family="text">
      <style:text-properties fo:color="#18ffff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66" style:family="text">
      <style:text-properties fo:color="#ff6e40" loext:opacity="100%" style:font-name="Courier New" fo:font-size="9pt" fo:font-weight="bold" fo:background-color="#3e2723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67" style:family="text">
      <style:text-properties fo:color="#ff1744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68" style:family="text">
      <style:text-properties fo:color="#d500f9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69" style:family="text">
      <style:text-properties fo:color="#b71c1c" loext:opacity="100%" style:font-name="Courier New" fo:font-size="9pt" fo:font-weight="bold" fo:background-color="#76ff03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70" style:family="text">
      <style:text-properties fo:color="#ffff00" loext:opacity="100%" style:font-name="Courier New" fo:font-size="9pt" fo:font-weight="bold" fo:background-color="#ff91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71" style:family="text">
      <style:text-properties fo:color="#18ffff" loext:opacity="100%" style:font-name="Courier New" fo:font-size="9pt" fo:font-weight="bold" fo:background-color="#ff1744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72" style:family="text">
      <style:text-properties fo:color="#1a6b72" loext:opacity="100%" style:font-name="Arial" fo:font-size="14pt" fo:font-weight="bold" fo:background-color="#ffd740" loext:char-shading-value="0" style:font-size-asian="14pt" style:font-weight-asian="bold" style:font-name-complex="Arial2" style:font-size-complex="14pt" style:font-weight-complex="bold"/>
    </style:style>
    <style:style style:name="T173" style:family="text">
      <style:text-properties fo:color="#1e5631" loext:opacity="100%" style:font-name="Courier New" fo:font-size="11pt" fo:font-weight="bold" fo:background-color="#ffff00" loext:char-shading-value="0" style:font-name-asian="Courier New1" style:font-size-asian="11pt" style:font-weight-asian="bold" style:font-name-complex="Courier New1" style:font-size-complex="11pt" style:font-weight-complex="bold"/>
    </style:style>
    <style:style style:name="T174" style:family="text">
      <style:text-properties fo:color="#1f3864" loext:opacity="100%" style:font-name="Arial" fo:font-size="18pt" fo:font-weight="bold" fo:background-color="#ffab40" loext:char-shading-value="0" style:font-size-asian="18pt" style:font-weight-asian="bold" style:font-name-complex="Arial2" style:font-size-complex="18pt" style:font-weight-complex="bold"/>
    </style:style>
    <style:style style:name="T175" style:family="text">
      <style:text-properties fo:color="#1f3864" loext:opacity="100%" style:font-name="Arial" fo:font-size="18pt" fo:font-weight="bold" fo:background-color="#ffab40" loext:char-shading-value="0" style:font-name-asian="Arial2" style:font-size-asian="18pt" style:font-weight-asian="bold" style:font-name-complex="Arial2" style:font-size-complex="18pt" style:font-weight-complex="bold"/>
    </style:style>
    <style:style style:name="T176" style:family="text">
      <style:text-properties fo:color="#ffff00" loext:opacity="100%" fo:font-size="11pt" fo:font-weight="bold" fo:background-color="#3d5afe" loext:char-shading-value="0" style:font-name-asian="Arial2" style:font-size-asian="11pt" style:font-weight-asian="bold" style:font-name-complex="Arial2" style:font-size-complex="11pt" style:font-weight-complex="bold"/>
    </style:style>
    <style:style style:name="T177" style:family="text">
      <style:text-properties fo:color="#ffff00" loext:opacity="100%" style:font-name="Arial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178" style:family="text">
      <style:text-properties fo:color="#ff1744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79" style:family="text">
      <style:text-properties fo:color="#ff1744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80" style:family="text">
      <style:text-properties fo:color="#444444" loext:opacity="100%" style:font-name="Arial" fo:font-size="11pt" fo:font-weight="bold" fo:background-color="#b2ff59" loext:char-shading-value="0" style:font-size-asian="11pt" style:font-weight-asian="bold" style:font-name-complex="Arial2" style:font-size-complex="11pt" style:font-weight-complex="bold"/>
    </style:style>
    <style:style style:name="T181" style:family="text">
      <style:text-properties fo:color="#c62828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82" style:family="text">
      <style:text-properties fo:color="#c62828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83" style:family="text">
      <style:text-properties fo:color="#c62828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84" style:family="text">
      <style:text-properties fo:color="#18ffff" loext:opacity="100%" fo:font-size="9pt" fo:font-weight="bold" fo:background-color="#d500f9" loext:char-shading-value="0" style:font-name-asian="Arial2" style:font-size-asian="9pt" style:font-weight-asian="bold" style:font-name-complex="Arial2" style:font-size-complex="9pt" style:font-weight-complex="bold"/>
    </style:style>
    <style:style style:name="T185" style:family="text">
      <style:text-properties fo:background-color="#ffff00" loext:char-shading-value="0"/>
    </style:style>
    <style:style style:name="T186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187" style:family="text">
      <style:text-properties fo:color="#18ffff" loext:opacity="100%"/>
    </style:style>
    <style:style style:name="T188" style:family="text">
      <style:text-properties fo:font-weight="bold" fo:background-color="#ffff00" loext:char-shading-value="0" style:font-weight-asian="bold" style:font-weight-complex="bold"/>
    </style:style>
    <style:style style:name="T189" style:family="text">
      <style:text-properties fo:font-weight="bold" fo:background-color="#ffd740" loext:char-shading-value="0" style:font-weight-asian="bold" style:font-weight-complex="bold"/>
    </style:style>
    <style:style style:name="T190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191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192" style:family="text">
      <style:text-properties fo:color="#ffd740" loext:opacity="100%" fo:font-weight="bold" fo:background-color="#651fff" loext:char-shading-value="0" style:font-weight-asian="bold" style:font-weight-complex="bold"/>
    </style:style>
    <style:style style:name="T193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194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95" style:family="text">
      <style:text-properties fo:font-weight="bold" fo:background-color="#76ff03" loext:char-shading-value="0" style:font-weight-asian="bold" style:font-weight-complex="bold"/>
    </style:style>
    <style:style style:name="T196" style:family="text">
      <style:text-properties fo:color="#eeff41" loext:opacity="100%" fo:font-weight="bold" fo:background-color="#ff6e40" loext:char-shading-value="0" style:font-weight-asian="bold" style:font-weight-complex="bold"/>
    </style:style>
    <style:style style:name="T197" style:family="text">
      <style:text-properties fo:color="#1a6b72" loext:opacity="100%" style:font-name="Arial" fo:font-size="13pt" fo:font-weight="bold" style:font-name-asian="Arial2" style:font-size-asian="13pt" style:font-weight-asian="bold"/>
    </style:style>
    <style:style style:name="T198" style:family="text">
      <style:text-properties fo:background-color="#ffd740" loext:char-shading-value="0"/>
    </style:style>
    <style:style style:name="T199" style:family="text">
      <style:text-properties fo:background-color="#18ffff" loext:char-shading-value="0"/>
    </style:style>
    <style:style style:name="T200" style:family="text">
      <style:text-properties fo:color="#ffff00" loext:opacity="100%" fo:background-color="#ff1744" loext:char-shading-value="0"/>
    </style:style>
    <style:style style:name="T201" style:family="text">
      <style:text-properties fo:color="#1a6b72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202" style:family="text">
      <style:text-properties fo:color="#1a6b72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203" style:family="text">
      <style:text-properties fo:color="#444444" loext:opacity="100%" style:font-name="Arial" fo:font-size="9pt" style:font-name-asian="Arial2" style:font-size-asian="9pt" style:font-name-complex="Arial2" style:font-size-complex="9pt"/>
    </style:style>
    <style:style style:name="T204" style:family="text">
      <style:text-properties fo:color="#444444" loext:opacity="100%" fo:font-size="9pt" style:font-name-asian="Arial2" style:font-size-asian="9pt" style:font-name-complex="Arial2" style:font-size-complex="9pt"/>
    </style:style>
    <style:style style:name="T205" style:family="text">
      <style:text-properties fo:color="#444444" loext:opacity="100%" style:font-name="Arial" fo:font-size="9pt" style:font-size-asian="9pt" style:font-name-complex="Arial2" style:font-size-complex="9pt"/>
    </style:style>
    <style:style style:name="T206" style:family="text">
      <style:text-properties fo:color="#1f3864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07" style:family="text">
      <style:text-properties fo:color="#1f3864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208" style:family="text">
      <style:text-properties fo:color="#1a6b72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09" style:family="text">
      <style:text-properties fo:color="#1a6b72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210" style:family="text">
      <style:text-properties fo:color="#1a6b72" loext:opacity="100%" fo:font-size="12pt" fo:font-weight="bold" style:font-name-asian="Arial2" style:font-size-asian="12pt" style:font-weight-asian="bold" style:font-name-complex="Arial2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" loext:marker-style-name="T1"><text:span text:style-name="T2">運算式樹 </text:span><text:span text:style-name="T3">Expression Tree</text:span></text:p>
            <text:p text:style-name="P2" loext:marker-style-name="T4"><text:span text:style-name="T5">資訊類考試完整筆記 </text:span><text:span text:style-name="T6">· </text:span><text:span text:style-name="T5">從零開始到考試必勝</text:span></text:p>
          </table:table-cell>
        </table:table-row>
      </table:table>
      <text:p text:style-name="P3"/>
      <text:h text:style-name="P4" text:outline-level="1" loext:marker-style-name="T7"><text:span text:style-name="T8">第一部分：基本定義</text:span><text:span text:style-name="T7"/></text:h>
      <text:p text:style-name="P5"/>
      <text:h text:style-name="P6" text:outline-level="2" loext:marker-style-name="T9"><text:span text:style-name="T10">什麼是運算式樹 </text:span><text:span text:style-name="T9">(Expression Tree)</text:span><text:span text:style-name="T10">？</text:span></text:h>
      <text:p text:style-name="P7" loext:marker-style-name="T11"><text:span text:style-name="T12">運算式樹是一種特殊的二元樹，用來表示算術或邏輯運算式。它把整個算式的結構以樹狀方式呈現，讓電腦能清楚理解每一個運算的先後順序。</text:span><text:span text:style-name="T11"/></text:p>
      <text:p text:style-name="P8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9" loext:marker-style-name="T13"><text:span text:style-name="T14">核心規則（考試必記）</text:span><text:span text:style-name="T13"/></text:p>
            <text:p text:style-name="P10" loext:marker-style-name="T11"><text:span text:style-name="T15">• </text:span><text:span text:style-name="T16">葉節點 </text:span><text:span text:style-name="T17">(Leaf Node)</text:span><text:span text:style-name="T16">：存放 運算元 </text:span><text:span text:style-name="T17">(Operand)</text:span><text:span text:style-name="T12">，例如 </text:span><text:span text:style-name="T15">A</text:span><text:span text:style-name="T12">、</text:span><text:span text:style-name="T15">B</text:span><text:span text:style-name="T12">、</text:span><text:span text:style-name="T15">3</text:span><text:span text:style-name="T12">、</text:span><text:span text:style-name="T15">5</text:span></text:p>
            <text:p text:style-name="P10" loext:marker-style-name="T11"><text:span text:style-name="T15">• </text:span><text:span text:style-name="T18">內部節點 </text:span><text:span text:style-name="T19">(Internal Node)</text:span><text:span text:style-name="T18">：存放 運算子 </text:span><text:span text:style-name="T19">(Operator)</text:span><text:span text:style-name="T12">，例如 </text:span><text:span text:style-name="T15">+</text:span><text:span text:style-name="T12">、</text:span><text:span text:style-name="T15">-</text:span><text:span text:style-name="T12">、</text:span><text:span text:style-name="T15">×</text:span><text:span text:style-name="T12">、</text:span><text:span text:style-name="T15">÷</text:span></text:p>
            <text:p text:style-name="P10" loext:marker-style-name="T11"><text:span text:style-name="T15">•</text:span><text:span text:style-name="T20"> </text:span><text:span text:style-name="T21">通常是 </text:span><text:span text:style-name="T22">Full Binary Tree</text:span><text:span text:style-name="T12">（每個節點恰好有 </text:span><text:span text:style-name="T15">0 </text:span><text:span text:style-name="T12">或 </text:span><text:span text:style-name="T15">2 </text:span><text:span text:style-name="T12">個子節點）</text:span></text:p>
            <text:p text:style-name="P10" loext:marker-style-name="T23"><text:span text:style-name="T24">• </text:span><text:span text:style-name="T25">若允許一元運算子（如 </text:span><text:span text:style-name="T24">sin</text:span><text:span text:style-name="T25">、</text:span><text:span text:style-name="T24">sqrt</text:span><text:span text:style-name="T25">），則不一定是 </text:span><text:span text:style-name="T24">Full Binary Tree</text:span></text:p>
          </table:table-cell>
        </table:table-row>
      </table:table>
      <text:p text:style-name="P11"/>
      <text:h text:style-name="P6" text:outline-level="2" loext:marker-style-name="T9"><text:span text:style-name="T10">範例：</text:span><text:span text:style-name="T9">(A+B)×C </text:span><text:span text:style-name="T10">的運算式樹</text:span>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2" loext:marker-style-name="T26"><text:span text:style-name="T26"><text:s text:c="7"/>×</text:span><text:span text:style-name="T26"/></text:p>
            <text:p text:style-name="P13" loext:marker-style-name="T27"><text:span text:style-name="T27"><text:s text:c="6"/>/ \</text:span><text:span text:style-name="T27"/></text:p>
            <text:p text:style-name="P13" loext:marker-style-name="T27"><text:span text:style-name="T27"><text:s text:c="25"/>+ <text:s text:c="2"/>C <text:s text:c="3"/>← 葉節點（運算元）</text:span><text:span text:style-name="T27"/></text:p>
            <text:p text:style-name="P14" loext:marker-style-name="T27"><text:span text:style-name="T27"><text:s text:c="4"/>/ \</text:span><text:span text:style-name="T27"/></text:p>
            <text:p text:style-name="P14" loext:marker-style-name="T27"><text:span text:style-name="T27"><text:s text:c="22"/>A <text:s text:c="2"/>B <text:s/>← 葉節點（運算元）</text:span><text:span text:style-name="T27"/></text:p>
            <text:p text:style-name="P15" loext:marker-style-name="T28"><text:span text:style-name="T29">× </text:span><text:span text:style-name="T30">和 </text:span><text:span text:style-name="T29">+ </text:span><text:span text:style-name="T30">是內部節點（運算子）</text:span><text:span text:style-name="T31">；</text:span><text:span text:style-name="T32">A</text:span><text:span text:style-name="T33">、</text:span><text:span text:style-name="T32">B</text:span><text:span text:style-name="T33">、</text:span><text:span text:style-name="T32">C </text:span><text:span text:style-name="T33">是葉節點（運算元）</text:span></text:p>
          </table:table-cell>
        </table:table-row>
      </table:table>
      <text:p text:style-name="P11"/>
      <text:p text:style-name="Standard"/>
      <text:h text:style-name="P16" text:outline-level="1" loext:marker-style-name="T7"><text:span text:style-name="T8">第二部分：三種走訪方式（</text:span><text:span text:style-name="T7">Traversal</text:span><text:span text:style-name="T8">）</text:span></text:h>
      <text:p text:style-name="P5"/>
      <text:p text:style-name="P7" loext:marker-style-name="T11"><text:span text:style-name="T12">這是 </text:span><text:span text:style-name="T15">Expression Tree </text:span><text:span text:style-name="T12">最核心的考點。三種走訪方式，對應三種不同的運算式表示法：</text:span></text:p>
      <text:p text:style-name="P17"/>
      <table:table table:name="表格4" table:style-name="表格4">
        <table:table-column table:style-name="表格4.A" table:number-columns-repeated="4"/>
        <table:table-row table:style-name="表格4.1">
          <table:table-cell table:style-name="表格4.A1" office:value-type="string">
            <text:p text:style-name="Standard" loext:marker-style-name="T34"><text:span text:style-name="T35">走訪方式</text:span><text:span text:style-name="T34"/></text:p>
          </table:table-cell>
          <table:table-cell table:style-name="表格4.A1" office:value-type="string">
            <text:p text:style-name="Standard" loext:marker-style-name="T34"><text:span text:style-name="T35">順序</text:span><text:span text:style-name="T34"/></text:p>
          </table:table-cell>
          <table:table-cell table:style-name="表格4.A1" office:value-type="string">
            <text:p text:style-name="Standard" loext:marker-style-name="T34"><text:span text:style-name="T35">對應表示法</text:span><text:span text:style-name="T34"/></text:p>
          </table:table-cell>
          <table:table-cell table:style-name="表格4.A1" office:value-type="string">
            <text:p text:style-name="Standard" loext:marker-style-name="T34"><text:span text:style-name="T35">說明</text:span><text:span text:style-name="T34"/></text:p>
          </table:table-cell>
        </table:table-row>
        <table:table-row table:style-name="表格4.1">
          <table:table-cell table:style-name="表格4.A2" office:value-type="string">
            <text:p text:style-name="Standard" loext:marker-style-name="T36"><text:span text:style-name="T37">Preorder</text:span><text:span text:style-name="T38">（</text:span><text:span text:style-name="T39">前序</text:span><text:span text:style-name="T38">）</text:span></text:p>
          </table:table-cell>
          <table:table-cell table:style-name="表格4.A2" office:value-type="string">
            <text:p text:style-name="Standard" loext:marker-style-name="T40"><text:span text:style-name="T41">根 → 左 → 右</text:span><text:span text:style-name="T40"/></text:p>
          </table:table-cell>
          <table:table-cell table:style-name="表格4.A2" office:value-type="string">
            <text:p text:style-name="Standard" loext:marker-style-name="T36"><text:span text:style-name="T42">Pre</text:span><text:span text:style-name="T37">fix</text:span><text:span text:style-name="T38">（前置表示法）</text:span></text:p>
          </table:table-cell>
          <table:table-cell table:style-name="表格4.A2" office:value-type="string">
            <text:p text:style-name="Standard" loext:marker-style-name="T36"><text:span text:style-name="T38">第一個元素就是根</text:span><text:span text:style-name="T36"/></text:p>
          </table:table-cell>
        </table:table-row>
        <table:table-row table:style-name="表格4.1">
          <table:table-cell table:style-name="表格4.A3" office:value-type="string">
            <text:p text:style-name="Standard" loext:marker-style-name="T43"><text:span text:style-name="T44">Inorder</text:span><text:span text:style-name="T45">（</text:span><text:span text:style-name="T39">中序</text:span><text:span text:style-name="T45">）</text:span></text:p>
          </table:table-cell>
          <table:table-cell table:style-name="表格4.A3" office:value-type="string">
            <text:p text:style-name="Standard" loext:marker-style-name="T46"><text:span text:style-name="T47">左 → 根 → 右</text:span><text:span text:style-name="T46"/></text:p>
          </table:table-cell>
          <table:table-cell table:style-name="表格4.A3" office:value-type="string">
            <text:p text:style-name="Standard" loext:marker-style-name="T43"><text:span text:style-name="T42">In</text:span><text:span text:style-name="T44">fix</text:span><text:span text:style-name="T45">（中置表示法）</text:span></text:p>
          </table:table-cell>
          <table:table-cell table:style-name="表格4.A3" office:value-type="string">
            <text:p text:style-name="P18" loext:marker-style-name="T43"/>
          </table:table-cell>
        </table:table-row>
        <table:table-row table:style-name="表格4.1">
          <table:table-cell table:style-name="表格4.A4" office:value-type="string">
            <text:p text:style-name="Standard" loext:marker-style-name="T28"><text:span text:style-name="T48">Postorder</text:span><text:span text:style-name="T31">（</text:span><text:span text:style-name="T39">後序</text:span><text:span text:style-name="T31">）</text:span></text:p>
          </table:table-cell>
          <table:table-cell table:style-name="表格4.A4" office:value-type="string">
            <text:p text:style-name="Standard" loext:marker-style-name="T49"><text:span text:style-name="T50">左 → 右 → 根</text:span><text:span text:style-name="T49"/></text:p>
          </table:table-cell>
          <table:table-cell table:style-name="表格4.A4" office:value-type="string">
            <text:p text:style-name="Standard" loext:marker-style-name="T28"><text:span text:style-name="T42">Post</text:span><text:span text:style-name="T48">fix</text:span><text:span text:style-name="T31">（後置表示法）</text:span></text:p>
          </table:table-cell>
          <table:table-cell table:style-name="表格4.A4" office:value-type="string">
            <text:p text:style-name="Standard" loext:marker-style-name="T28"><text:span text:style-name="T31">最後才記錄根節點</text:span><text:span text:style-name="T28"/></text:p>
          </table:table-cell>
        </table:table-row>
      </table:table>
      <text:p text:style-name="P11"/>
      <text:h text:style-name="P6" text:outline-level="2" loext:marker-style-name="T9"><text:span text:style-name="T10">記憶口訣（考試當場不忘）</text:span><text:span text:style-name="T9"/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5" loext:marker-style-name="T51"><text:span text:style-name="T52">Preorder</text:span><text:span text:style-name="T53">（前序）：進房間立刻簽到 → 先記根，再走左右</text:span></text:p>
            <text:p text:style-name="P10" loext:marker-style-name="T54"><text:span text:style-name="T55">Inorder</text:span><text:span text:style-name="T56">（中序）：先進左房間，才簽到，再進右房間</text:span></text:p>
            <text:p text:style-name="P19" loext:marker-style-name="T13"><text:span text:style-name="T57">Postorder</text:span><text:span text:style-name="T14">（後序）：所有房間都查完，最後才簽退 → 根最後記錄</text:span></text:p>
          </table:table-cell>
        </table:table-row>
      </table:table>
      <text:p text:style-name="P11"/>
      <text:h text:style-name="P6" text:outline-level="2" loext:marker-style-name="T9"><text:span text:style-name="T10">重要注意事項：</text:span><text:span text:style-name="T9">Inorder </text:span><text:span text:style-name="T10">與原式的差異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5" loext:marker-style-name="T58"><text:span text:style-name="T59">「中序走訪 </text:span><text:span text:style-name="T60">= </text:span><text:span text:style-name="T59">原始算式」這個說法並不完全準確！</text:span></text:p>
            <text:p text:style-name="P10" loext:marker-style-name="T11"><text:span text:style-name="T12">範例：樹的根為 </text:span><text:span text:style-name="T15">×</text:span><text:span text:style-name="T12">，左子樹為 </text:span><text:span text:style-name="T15">(A+B)</text:span><text:span text:style-name="T12">，右子樹為 </text:span><text:span text:style-name="T15">C</text:span></text:p>
            <text:p text:style-name="P10" loext:marker-style-name="T61"><text:span text:style-name="T61">中序走訪結果：A+B×C（少了括號！）</text:span><text:span text:style-name="T61"/></text:p>
            <text:p text:style-name="P19" loext:marker-style-name="T62"><text:span text:style-name="T62">原始算式應為：(A+B)×C（有括號才正確）</text:span><text:span text:style-name="T62"/></text:p>
            <text:p text:style-name="P20" loext:marker-style-name="T11"><text:span text:style-name="T12">結論：</text:span><text:span text:style-name="T63">中序走訪還原原式時，必要時需補上括號</text:span><text:span text:style-name="T12">，考試要特別留意。</text:span></text:p>
          </table:table-cell>
        </table:table-row>
      </table:table>
      <text:p text:style-name="Standard"/>
      <text:h text:style-name="P16" text:outline-level="1" loext:marker-style-name="T7"><text:span text:style-name="T8">第三部分：如何建立 </text:span><text:span text:style-name="T7">Expression Tree</text:span><text:span text:style-name="T8">（從算式長出樹）</text:span></text:h>
      <text:p text:style-name="P5"/>
      <text:p text:style-name="P7" loext:marker-style-name="T11"><text:span text:style-name="T12">核心原則只有一句：</text:span><text:span text:style-name="T11"/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1" loext:marker-style-name="T64"><text:span text:style-name="T65">「</text:span><text:span text:style-name="T66">找最後執行的運算子</text:span><text:span text:style-name="T65">，</text:span><text:span text:style-name="T67">它就是目前子樹的根節點</text:span><text:span text:style-name="T65">。」</text:span></text:p>
          </table:table-cell>
        </table:table-row>
      </table:table>
      <text:p text:style-name="P11"/>
      <text:h text:style-name="P6" text:outline-level="2" loext:marker-style-name="T9"><text:span text:style-name="T9">112</text:span><text:span text:style-name="T10">題實戰：</text:span><text:span text:style-name="T68">A/B-C+D×E-A×C</text:span><text:span text:style-name="T9"> → </text:span><text:span text:style-name="T10">建樹步驟</text:span></text:h>
      <text:p text:style-name="P7" loext:marker-style-name="T26"><text:span text:style-name="T26">原式：A/B-C+D×E-A×C</text:span><text:span text:style-name="T26"/></text:p>
      <text:p text:style-name="P8"/>
      <table:table table:name="表格8" table:style-name="表格8">
        <table:table-column table:style-name="表格8.A"/>
        <table:table-column table:style-name="表格8.B"/>
        <table:table-column table:style-name="表格8.C"/>
        <table:table-row table:style-name="表格8.1">
          <table:table-cell table:style-name="表格8.A1" office:value-type="string">
            <text:p text:style-name="Standard" loext:marker-style-name="T34"><text:span text:style-name="T35">步驟</text:span><text:span text:style-name="T34"/></text:p>
          </table:table-cell>
          <table:table-cell table:style-name="表格8.A1" office:value-type="string">
            <text:p text:style-name="Standard" loext:marker-style-name="T34"><text:span text:style-name="T35">重點問題</text:span><text:span text:style-name="T34"/></text:p>
          </table:table-cell>
          <table:table-cell table:style-name="表格8.A1" office:value-type="string">
            <text:p text:style-name="Standard" loext:marker-style-name="T34"><text:span text:style-name="T35">說明與結果</text:span><text:span text:style-name="T34"/></text:p>
          </table:table-cell>
        </table:table-row>
        <table:table-row table:style-name="表格8.1">
          <table:table-cell table:style-name="表格8.A2" office:value-type="string">
            <text:p text:style-name="P10" loext:marker-style-name="T69"><text:span text:style-name="T70">步驟 </text:span><text:span text:style-name="T71">1</text:span></text:p>
          </table:table-cell>
          <table:table-cell table:style-name="表格8.A2" office:value-type="string">
            <text:p text:style-name="P10" loext:marker-style-name="T72"><text:span text:style-name="T73">找高優先權運算</text:span><text:span text:style-name="T74">（</text:span><text:span text:style-name="T75">乘除先</text:span><text:span text:style-name="T74">）</text:span></text:p>
          </table:table-cell>
          <table:table-cell table:style-name="表格8.A2" office:value-type="string">
            <text:p text:style-name="P10" loext:marker-style-name="T76"><text:span text:style-name="T76">圈出：</text:span><text:span text:style-name="T77">(A/B)</text:span><text:span text:style-name="T76">、</text:span><text:span text:style-name="T77">(D×E)</text:span><text:span text:style-name="T76">、</text:span><text:span text:style-name="T77">(A×C)</text:span></text:p>
            <text:p text:style-name="P10" loext:marker-style-name="T76"><text:span text:style-name="T76">整理：(A/B)-C+(D×E)-(A×C)</text:span><text:span text:style-name="T76"/></text:p>
          </table:table-cell>
        </table:table-row>
        <table:table-row table:style-name="表格8.1">
          <table:table-cell table:style-name="表格8.A3" office:value-type="string">
            <text:p text:style-name="P10" loext:marker-style-name="T69"><text:span text:style-name="T70">步驟 </text:span><text:span text:style-name="T71">2</text:span></text:p>
          </table:table-cell>
          <table:table-cell table:style-name="表格8.A3" office:value-type="string">
            <text:p text:style-name="P10" loext:marker-style-name="T78"><text:span text:style-name="T79">找最後執行的運算子</text:span><text:span text:style-name="T78"/></text:p>
          </table:table-cell>
          <table:table-cell table:style-name="表格8.A3" office:value-type="string">
            <text:p text:style-name="P10" loext:marker-style-name="T76"><text:span text:style-name="T80">加、減同優先 → 左結合（由左往右）<text:line-break/><text:line-break/>(A/B)-C+(D×E)-(A×C)<text:line-break/>= (((A/B)-C)+(D×E))-(A×C)<text:line-break/><text:line-break/>最外層（最後）的運算子就是 Root<text:line-break/>⇒ Root = -</text:span></text:p>
          </table:table-cell>
        </table:table-row>
        <table:table-row table:style-name="表格8.1">
          <table:table-cell table:style-name="表格8.A2" office:value-type="string">
            <text:p text:style-name="P10" loext:marker-style-name="T69"><text:span text:style-name="T70">步驟 </text:span><text:span text:style-name="T71">3</text:span></text:p>
          </table:table-cell>
          <table:table-cell table:style-name="表格8.A2" office:value-type="string">
            <text:p text:style-name="P10" loext:marker-style-name="T81"><text:span text:style-name="T82">切左右子樹</text:span><text:span text:style-name="T81"/></text:p>
          </table:table-cell>
          <table:table-cell table:style-name="表格8.A2" office:value-type="string">
            <text:p text:style-name="P10" loext:marker-style-name="T83"><text:span text:style-name="T83">左子樹：((A/B)-C)+(D×E)</text:span><text:span text:style-name="T83"/></text:p>
            <text:p text:style-name="P10" loext:marker-style-name="T83"><text:span text:style-name="T83">右子樹：(A×C)</text:span><text:span text:style-name="T83"/></text:p>
          </table:table-cell>
        </table:table-row>
        <table:table-row table:style-name="表格8.1">
          <table:table-cell table:style-name="表格8.A3" office:value-type="string">
            <text:p text:style-name="P10" loext:marker-style-name="T69"><text:span text:style-name="T70">步驟 </text:span><text:span text:style-name="T71">4</text:span></text:p>
          </table:table-cell>
          <table:table-cell table:style-name="表格8.A3" office:value-type="string">
            <text:p text:style-name="P10" loext:marker-style-name="T72"><text:span text:style-name="T74">遞迴處理左子樹</text:span><text:span text:style-name="T72"/></text:p>
          </table:table-cell>
          <table:table-cell table:style-name="表格8.A3" office:value-type="string">
            <text:p text:style-name="P10" loext:marker-style-name="T76"><text:span text:style-name="T84">左子樹最後算 +，再往下拆</text:span><text:span text:style-name="T76">：</text:span></text:p>
            <text:p text:style-name="P10" loext:marker-style-name="T83"><text:span text:style-name="T83">左：(A/B)-C，右：D×E</text:span><text:span text:style-name="T83"/></text:p>
          </table:table-cell>
        </table:table-row>
        <table:table-row table:style-name="表格8.1">
          <table:table-cell table:style-name="表格8.A2" office:value-type="string">
            <text:p text:style-name="P10" loext:marker-style-name="T69"><text:span text:style-name="T70">步驟 </text:span><text:span text:style-name="T71">5</text:span></text:p>
          </table:table-cell>
          <table:table-cell table:style-name="表格8.A2" office:value-type="string">
            <text:p text:style-name="P10" loext:marker-style-name="T72"><text:span text:style-name="T74">遞迴處理 </text:span><text:span text:style-name="T85">(A/B)-C</text:span></text:p>
          </table:table-cell>
          <table:table-cell table:style-name="表格8.A2" office:value-type="string">
            <text:p text:style-name="P10" loext:marker-style-name="T76"><text:span text:style-name="T84">最後算 -</text:span><text:span text:style-name="T76">，</text:span><text:span text:style-name="T83">左：A/B，右：C</text:span></text:p>
          </table:table-cell>
        </table:table-row>
        <table:table-row table:style-name="表格8.1">
          <table:table-cell table:style-name="表格8.A3" office:value-type="string">
            <text:p text:style-name="P10" loext:marker-style-name="T69"><text:span text:style-name="T70">步驟 </text:span><text:span text:style-name="T71">6</text:span></text:p>
          </table:table-cell>
          <table:table-cell table:style-name="表格8.A3" office:value-type="string">
            <text:p text:style-name="P10" loext:marker-style-name="T72"><text:span text:style-name="T74">處理 </text:span><text:span text:style-name="T85">A/B</text:span></text:p>
          </table:table-cell>
          <table:table-cell table:style-name="表格8.A3" office:value-type="string">
            <text:p text:style-name="P10" loext:marker-style-name="T76"><text:span text:style-name="T84">最後算 /</text:span><text:span text:style-name="T76">，</text:span><text:span text:style-name="T83">左：A，右：B</text:span></text:p>
          </table:table-cell>
        </table:table-row>
      </table:table>
      <text:p text:style-name="P22"/>
      <text:p text:style-name="P23" loext:marker-style-name="T86"><text:span text:style-name="T87">112</text:span><text:span text:style-name="T88">題完整表達式樹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4" loext:marker-style-name="T89"><text:span text:style-name="T89"><text:s text:c="15"/>- <text:s text:c="9"/>&lt;- 根節點（最後執行）</text:span><text:span text:style-name="T89"/></text:p>
            <text:p text:style-name="P25" loext:marker-style-name="T89"><text:span text:style-name="T89"><text:s text:c="13"/>/ <text:s text:c="2"/>\</text:span><text:span text:style-name="T89"/></text:p>
            <text:p text:style-name="P25" loext:marker-style-name="T89"><text:span text:style-name="T89"><text:s text:c="12"/>+ <text:s text:c="4"/>*</text:span><text:span text:style-name="T89"/></text:p>
            <text:p text:style-name="P25" loext:marker-style-name="T89"><text:span text:style-name="T89"><text:s text:c="11"/>/ \ <text:s text:c="2"/>/ \</text:span><text:span text:style-name="T89"/></text:p>
            <text:p text:style-name="P25" loext:marker-style-name="T89"><text:span text:style-name="T89"><text:s text:c="10"/>- <text:s text:c="2"/>* A <text:s text:c="2"/>C</text:span><text:span text:style-name="T89"/></text:p>
            <text:p text:style-name="P25" loext:marker-style-name="T89"><text:span text:style-name="T89"><text:s text:c="9"/>/ \ / \</text:span><text:span text:style-name="T89"/></text:p>
            <text:p text:style-name="P25" loext:marker-style-name="T89"><text:span text:style-name="T89"><text:s text:c="8"/>/ <text:s/>C D <text:s text:c="2"/>E</text:span><text:span text:style-name="T89"/></text:p>
            <text:p text:style-name="P25" loext:marker-style-name="T89"><text:span text:style-name="T89"><text:s text:c="7"/>/ \</text:span><text:span text:style-name="T89"/></text:p>
            <text:p text:style-name="P26" loext:marker-style-name="T89"><text:span text:style-name="T89"><text:s text:c="6"/>A <text:s text:c="2"/>B</text:span><text:span text:style-name="T89"/></text:p>
          </table:table-cell>
        </table:table-row>
      </table:table>
      <text:p text:style-name="P22"/>
      <text:p text:style-name="P23" loext:marker-style-name="T86"><text:span text:style-name="T87">112</text:span><text:span text:style-name="T88">題答案驗證</text:span></text:p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15"><text:span text:style-name="T53">前序 </text:span><text:span text:style-name="T52">(Preorder)</text:span><text:span text:style-name="T53">：</text:span><text:span text:style-name="T27"> <text:s/>-+-/ABC×DE×AC</text:span></text:p>
            <text:p text:style-name="P10"><text:soft-page-break/><text:span text:style-name="T14">後序 </text:span><text:span text:style-name="T57">(Postorder)</text:span><text:span text:style-name="T14">：</text:span><text:span text:style-name="T27"> <text:s/>AB/C-DE×+AC×-</text:span></text:p>
            <text:p text:style-name="P19"><text:span text:style-name="T56">中序 </text:span><text:span text:style-name="T55">(Inorder)</text:span><text:span text:style-name="T56">：</text:span><text:span text:style-name="T27"> <text:s/>A/B-C+D×E-A×C <text:s/>（還原為原始算式）</text:span></text:p>
            <text:p text:style-name="P20" loext:marker-style-name="T90"><text:span text:style-name="T91">★ </text:span><text:span text:style-name="T92">圖片原始標示：前序 </text:span><text:span text:style-name="T91">+-/ABC*DE*AC</text:span><text:span text:style-name="T92">，後序 </text:span><text:span text:style-name="T91">AB/C-DE*+AC*-</text:span><text:span text:style-name="T92">（與上方一致，</text:span><text:span text:style-name="T91">× </text:span><text:span text:style-name="T92">以 </text:span><text:span text:style-name="T91">* </text:span><text:span text:style-name="T92">符號表示）</text:span></text:p>
          </table:table-cell>
        </table:table-row>
      </table:table>
      <text:p text:style-name="Standard"/>
      <text:h text:style-name="P16" text:outline-level="1" loext:marker-style-name="T7"><text:span text:style-name="T8">第四部分：</text:span><text:span text:style-name="T93">Postfix Stack </text:span><text:span text:style-name="T94">求值</text:span></text:h>
      <text:p text:style-name="P5"/>
      <text:p text:style-name="P7" loext:marker-style-name="T11"><text:span text:style-name="T15">Postfix</text:span><text:span text:style-name="T12">（後置式）最大的優點：</text:span><text:span text:style-name="T95">不需要括號</text:span><text:span text:style-name="T12">，</text:span><text:span text:style-name="T96">不需要考慮優先權</text:span><text:span text:style-name="T12">，</text:span><text:span text:style-name="T63">只要用 </text:span><text:span text:style-name="T97">Stack </text:span><text:span text:style-name="T63">就能計算</text:span><text:span text:style-name="T12">。</text:span></text:p>
      <text:p text:style-name="P17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15" loext:marker-style-name="T98"><text:span text:style-name="T99">Postfix Stack </text:span><text:span text:style-name="T100">計算規則</text:span></text:p>
            <text:p text:style-name="P10" loext:marker-style-name="T11"><text:span text:style-name="T15">① </text:span><text:span text:style-name="T95">從左往右讀取每個符號</text:span></text:p>
            <text:p text:style-name="P27" loext:marker-style-name="T11"><text:span text:style-name="T15">② </text:span><text:span text:style-name="T96">看到 運算元（數字</text:span><text:span text:style-name="T101">/</text:span><text:span text:style-name="T96">變數）</text:span><text:span text:style-name="T12">→ </text:span><text:span text:style-name="T102">直接 </text:span><text:span text:style-name="T103">Push </text:span><text:span text:style-name="T102">進 </text:span><text:span text:style-name="T103">Stack</text:span></text:p>
            <text:p text:style-name="P28" loext:marker-style-name="T11"><text:span text:style-name="T15">③ </text:span><text:span text:style-name="T104">看到 運算子（</text:span><text:span text:style-name="T105">+</text:span><text:span text:style-name="T104">、</text:span><text:span text:style-name="T105">-</text:span><text:span text:style-name="T104">、</text:span><text:span text:style-name="T105">×</text:span><text:span text:style-name="T104">、</text:span><text:span text:style-name="T105">÷</text:span><text:span text:style-name="T104">）</text:span><text:span text:style-name="T12">→ </text:span><text:span text:style-name="T19">Pop </text:span><text:span text:style-name="T18">兩個值計算，結果 </text:span><text:span text:style-name="T19">Push </text:span><text:span text:style-name="T18">回 </text:span><text:span text:style-name="T19">Stack</text:span></text:p>
            <text:p text:style-name="P20" loext:marker-style-name="T106"><text:span text:style-name="T107">⚠️ </text:span><text:span text:style-name="T108">重要：</text:span><text:span text:style-name="T109">Pop </text:span><text:span text:style-name="T108">順序是「先 </text:span><text:span text:style-name="T109">Pop </text:span><text:span text:style-name="T108">的是右運算元，後 </text:span><text:span text:style-name="T109">Pop </text:span><text:span text:style-name="T108">的是左運算元」</text:span></text:p>
            <text:p text:style-name="P29" loext:marker-style-name="T90"><text:span text:style-name="T92">例：</text:span><text:span text:style-name="T110">Stack </text:span><text:span text:style-name="T111">由上到下為 </text:span><text:span text:style-name="T110">[5, 2]</text:span><text:span text:style-name="T92">，遇到 </text:span><text:span text:style-name="T91">-</text:span><text:span text:style-name="T92">，計算 </text:span><text:span text:style-name="T91">2 - 5 = -3</text:span><text:span text:style-name="T92">（</text:span><text:span text:style-name="T112">先</text:span><text:span text:style-name="T113">Pop</text:span><text:span text:style-name="T112">的</text:span><text:span text:style-name="T113">5</text:span><text:span text:style-name="T112">是右</text:span><text:span text:style-name="T92">，</text:span><text:span text:style-name="T114">後</text:span><text:span text:style-name="T115">Pop</text:span><text:span text:style-name="T114">的</text:span><text:span text:style-name="T115">2</text:span><text:span text:style-name="T114">是左</text:span><text:span text:style-name="T92">）</text:span></text:p>
          </table:table-cell>
        </table:table-row>
      </table:table>
      <text:p text:style-name="P11"/>
      <text:h text:style-name="P6" text:outline-level="2" loext:marker-style-name="T9"><text:span text:style-name="T9">113</text:span><text:span text:style-name="T10">題實戰：</text:span><text:span text:style-name="T9">36 12 ÷ 10 23 - × 50 40 - +</text:span></text:h>
      <text:p text:style-name="P7" loext:marker-style-name="T13"><text:span text:style-name="T14">答案 </text:span><text:span text:style-name="T57">= -29</text:span></text:p>
      <text:p text:style-name="P8"/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row table:style-name="表格12.1">
          <table:table-cell table:style-name="表格12.A1" office:value-type="string">
            <text:p text:style-name="Standard" loext:marker-style-name="T116"><text:span text:style-name="T117">步</text:span><text:span text:style-name="T116"/></text:p>
          </table:table-cell>
          <table:table-cell table:style-name="表格12.A1" office:value-type="string">
            <text:p text:style-name="Standard" loext:marker-style-name="T116"><text:span text:style-name="T117">符號</text:span><text:span text:style-name="T116"/></text:p>
          </table:table-cell>
          <table:table-cell table:style-name="表格12.A1" office:value-type="string">
            <text:p text:style-name="Standard" loext:marker-style-name="T116"><text:span text:style-name="T117">動作</text:span><text:span text:style-name="T116"/></text:p>
          </table:table-cell>
          <table:table-cell table:style-name="表格12.A1" office:value-type="string">
            <text:p text:style-name="Standard" loext:marker-style-name="T116"><text:span text:style-name="T118">Stack </text:span><text:span text:style-name="T117">狀態</text:span></text:p>
          </table:table-cell>
          <table:table-cell table:style-name="表格12.A1" office:value-type="string">
            <text:p text:style-name="Standard" loext:marker-style-name="T116"><text:span text:style-name="T117">計算</text:span><text:span text:style-name="T116"/></text:p>
          </table:table-cell>
        </table:table-row>
        <table:table-row table:style-name="表格12.1">
          <table:table-cell table:style-name="表格12.A2" office:value-type="string">
            <text:p text:style-name="Standard" loext:marker-style-name="T119"><text:span text:style-name="T120">①</text:span><text:span text:style-name="T119"/></text:p>
          </table:table-cell>
          <table:table-cell table:style-name="表格12.A2" office:value-type="string">
            <text:p text:style-name="Standard" loext:marker-style-name="T119"><text:span text:style-name="T120">36</text:span><text:span text:style-name="T119"/></text:p>
          </table:table-cell>
          <table:table-cell table:style-name="表格12.A2" office:value-type="string">
            <text:p text:style-name="Standard" loext:marker-style-name="T119"><text:span text:style-name="T120">Push 36</text:span><text:span text:style-name="T119"/></text:p>
          </table:table-cell>
          <table:table-cell table:style-name="表格12.A2" office:value-type="string">
            <text:p text:style-name="Standard" loext:marker-style-name="T119"><text:span text:style-name="T120">[36]</text:span><text:span text:style-name="T119"/>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Standard" loext:marker-style-name="T119"><text:span text:style-name="T120">②</text:span><text:span text:style-name="T119"/></text:p>
          </table:table-cell>
          <table:table-cell table:style-name="表格12.A3" office:value-type="string">
            <text:p text:style-name="Standard" loext:marker-style-name="T119"><text:span text:style-name="T120">12</text:span><text:span text:style-name="T119"/></text:p>
          </table:table-cell>
          <table:table-cell table:style-name="表格12.A3" office:value-type="string">
            <text:p text:style-name="Standard" loext:marker-style-name="T119"><text:span text:style-name="T120">Push 12 </text:span><text:span text:style-name="T112">先</text:span><text:span text:style-name="T113">Pop</text:span><text:span text:style-name="T112">的是右</text:span><text:span text:style-name="T121"> </text:span></text:p>
          </table:table-cell>
          <table:table-cell table:style-name="表格12.A3" office:value-type="string">
            <text:p text:style-name="Standard" loext:marker-style-name="T119"><text:span text:style-name="T120">[36, 12]</text:span><text:span text:style-name="T119"/>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Standard" loext:marker-style-name="T119"><text:span text:style-name="T120">③</text:span><text:span text:style-name="T119"/></text:p>
          </table:table-cell>
          <table:table-cell table:style-name="表格12.A2" office:value-type="string">
            <text:p text:style-name="Standard" loext:marker-style-name="T119"><text:span text:style-name="T120">÷</text:span><text:span text:style-name="T119"/></text:p>
          </table:table-cell>
          <table:table-cell table:style-name="表格12.A2" office:value-type="string">
            <text:p text:style-name="Standard" loext:marker-style-name="T119"><text:span text:style-name="T122">Pop 12</text:span><text:span text:style-name="T120">, Pop 36</text:span><text:span text:style-name="T121">，</text:span><text:span text:style-name="T123">計算 </text:span><text:span text:style-name="T124">36÷</text:span><text:span text:style-name="T122">12</text:span><text:span text:style-name="T124">=3</text:span><text:span text:style-name="T123">，</text:span><text:span text:style-name="T124">Push 3</text:span></text:p>
          </table:table-cell>
          <table:table-cell table:style-name="表格12.A2" office:value-type="string">
            <text:p text:style-name="Standard" loext:marker-style-name="T119"><text:span text:style-name="T120">[3]</text:span><text:span text:style-name="T119"/></text:p>
          </table:table-cell>
          <table:table-cell table:style-name="表格12.A2" office:value-type="string">
            <text:p text:style-name="Standard" loext:marker-style-name="T119"><text:span text:style-name="T120">36÷12=3</text:span><text:span text:style-name="T119"/></text:p>
          </table:table-cell>
        </table:table-row>
        <table:table-row table:style-name="表格12.1">
          <table:table-cell table:style-name="表格12.A3" office:value-type="string">
            <text:p text:style-name="Standard" loext:marker-style-name="T119"><text:span text:style-name="T120">④</text:span><text:span text:style-name="T119"/></text:p>
          </table:table-cell>
          <table:table-cell table:style-name="表格12.A3" office:value-type="string">
            <text:p text:style-name="Standard" loext:marker-style-name="T119"><text:span text:style-name="T120">10</text:span><text:span text:style-name="T119"/></text:p>
          </table:table-cell>
          <table:table-cell table:style-name="表格12.A3" office:value-type="string">
            <text:p text:style-name="Standard" loext:marker-style-name="T119"><text:span text:style-name="T120">Push 10</text:span><text:span text:style-name="T119"/></text:p>
          </table:table-cell>
          <table:table-cell table:style-name="表格12.A3" office:value-type="string">
            <text:p text:style-name="Standard" loext:marker-style-name="T119"><text:span text:style-name="T120">[3, 10]</text:span><text:span text:style-name="T119"/>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Standard" loext:marker-style-name="T119"><text:span text:style-name="T120">⑤</text:span><text:span text:style-name="T119"/></text:p>
          </table:table-cell>
          <table:table-cell table:style-name="表格12.A2" office:value-type="string">
            <text:p text:style-name="Standard" loext:marker-style-name="T119"><text:span text:style-name="T120">23</text:span><text:span text:style-name="T119"/></text:p>
          </table:table-cell>
          <table:table-cell table:style-name="表格12.A2" office:value-type="string">
            <text:p text:style-name="Standard" loext:marker-style-name="T119"><text:span text:style-name="T120">Push 23</text:span><text:span text:style-name="T119"/></text:p>
          </table:table-cell>
          <table:table-cell table:style-name="表格12.A2" office:value-type="string">
            <text:p text:style-name="Standard" loext:marker-style-name="T119"><text:span text:style-name="T120">[3, 10, 23]</text:span><text:span text:style-name="T119"/>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Standard" loext:marker-style-name="T119"><text:span text:style-name="T120">⑥</text:span><text:span text:style-name="T119"/></text:p>
          </table:table-cell>
          <table:table-cell table:style-name="表格12.A3" office:value-type="string">
            <text:p text:style-name="Standard" loext:marker-style-name="T119"><text:span text:style-name="T120">-</text:span><text:span text:style-name="T119"/></text:p>
          </table:table-cell>
          <table:table-cell table:style-name="表格12.A3" office:value-type="string">
            <text:p text:style-name="Standard" loext:marker-style-name="T119"><text:span text:style-name="T122">Pop 23</text:span><text:span text:style-name="T120">, Pop 10</text:span><text:span text:style-name="T121">，計算 </text:span><text:span text:style-name="T120">10-</text:span><text:span text:style-name="T122">23</text:span><text:span text:style-name="T120">=-13</text:span><text:span text:style-name="T121">，</text:span><text:span text:style-name="T120">Push -13</text:span></text:p>
          </table:table-cell>
          <table:table-cell table:style-name="表格12.A3" office:value-type="string">
            <text:p text:style-name="Standard" loext:marker-style-name="T119"><text:span text:style-name="T120">[3, -13]</text:span><text:span text:style-name="T119"/></text:p>
          </table:table-cell>
          <table:table-cell table:style-name="表格12.A3" office:value-type="string">
            <text:p text:style-name="Standard" loext:marker-style-name="T119"><text:span text:style-name="T120">10-23=-13</text:span><text:span text:style-name="T119"/></text:p>
          </table:table-cell>
        </table:table-row>
        <table:table-row table:style-name="表格12.1">
          <table:table-cell table:style-name="表格12.A2" office:value-type="string">
            <text:p text:style-name="Standard" loext:marker-style-name="T119"><text:span text:style-name="T120">⑦</text:span><text:span text:style-name="T119"/></text:p>
          </table:table-cell>
          <table:table-cell table:style-name="表格12.A2" office:value-type="string">
            <text:p text:style-name="Standard" loext:marker-style-name="T119"><text:span text:style-name="T120">×</text:span><text:span text:style-name="T119"/></text:p>
          </table:table-cell>
          <table:table-cell table:style-name="表格12.A2" office:value-type="string">
            <text:p text:style-name="Standard" loext:marker-style-name="T119"><text:span text:style-name="T122">Pop -13</text:span><text:span text:style-name="T120">, Pop 3</text:span><text:span text:style-name="T121">，計算 </text:span><text:span text:style-name="T120">3×</text:span><text:span text:style-name="T122">(-13)</text:span><text:span text:style-name="T120">=-39</text:span><text:span text:style-name="T121">，</text:span><text:span text:style-name="T120">Push -39</text:span></text:p>
          </table:table-cell>
          <table:table-cell table:style-name="表格12.A2" office:value-type="string">
            <text:p text:style-name="Standard" loext:marker-style-name="T119"><text:span text:style-name="T120">[-39]</text:span><text:span text:style-name="T119"/></text:p>
          </table:table-cell>
          <table:table-cell table:style-name="表格12.A2" office:value-type="string">
            <text:p text:style-name="Standard" loext:marker-style-name="T119"><text:span text:style-name="T120">3×(-13)=-39</text:span><text:span text:style-name="T119"/></text:p>
          </table:table-cell>
        </table:table-row>
        <table:table-row table:style-name="表格12.1">
          <table:table-cell table:style-name="表格12.A3" office:value-type="string">
            <text:p text:style-name="Standard" loext:marker-style-name="T119"><text:span text:style-name="T120">⑧</text:span><text:span text:style-name="T119"/></text:p>
          </table:table-cell>
          <table:table-cell table:style-name="表格12.A3" office:value-type="string">
            <text:p text:style-name="Standard" loext:marker-style-name="T119"><text:span text:style-name="T120">50</text:span><text:span text:style-name="T119"/></text:p>
          </table:table-cell>
          <table:table-cell table:style-name="表格12.A3" office:value-type="string">
            <text:p text:style-name="Standard" loext:marker-style-name="T119"><text:span text:style-name="T120">Push 50</text:span><text:span text:style-name="T119"/></text:p>
          </table:table-cell>
          <table:table-cell table:style-name="表格12.A3" office:value-type="string">
            <text:p text:style-name="Standard" loext:marker-style-name="T119"><text:span text:style-name="T120">[-39, 50]</text:span><text:span text:style-name="T119"/>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Standard" loext:marker-style-name="T119"><text:span text:style-name="T120">⑨</text:span><text:span text:style-name="T119"/></text:p>
          </table:table-cell>
          <table:table-cell table:style-name="表格12.A2" office:value-type="string">
            <text:p text:style-name="Standard" loext:marker-style-name="T119"><text:span text:style-name="T120">40</text:span><text:span text:style-name="T119"/></text:p>
          </table:table-cell>
          <table:table-cell table:style-name="表格12.A2" office:value-type="string">
            <text:p text:style-name="Standard" loext:marker-style-name="T119"><text:span text:style-name="T120">Push 40</text:span><text:span text:style-name="T119"/></text:p>
          </table:table-cell>
          <table:table-cell table:style-name="表格12.A2" office:value-type="string">
            <text:p text:style-name="Standard" loext:marker-style-name="T119"><text:span text:style-name="T120">[-39, 50, 40]</text:span><text:span text:style-name="T119"/>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Standard" loext:marker-style-name="T119"><text:span text:style-name="T120">⑩</text:span><text:span text:style-name="T119"/></text:p>
          </table:table-cell>
          <table:table-cell table:style-name="表格12.A3" office:value-type="string">
            <text:p text:style-name="Standard" loext:marker-style-name="T119"><text:span text:style-name="T120">-</text:span><text:span text:style-name="T119"/></text:p>
          </table:table-cell>
          <table:table-cell table:style-name="表格12.A3" office:value-type="string">
            <text:p text:style-name="Standard" loext:marker-style-name="T119"><text:span text:style-name="T122">Pop 40</text:span><text:span text:style-name="T120">, Pop 50</text:span><text:span text:style-name="T121">，計算 </text:span><text:span text:style-name="T120">50-</text:span><text:span text:style-name="T122">40</text:span><text:span text:style-name="T120">=10</text:span><text:span text:style-name="T121">，</text:span><text:span text:style-name="T120">Push 10</text:span></text:p>
          </table:table-cell>
          <table:table-cell table:style-name="表格12.A3" office:value-type="string">
            <text:p text:style-name="Standard" loext:marker-style-name="T119"><text:span text:style-name="T120">[-39, 10]</text:span><text:span text:style-name="T119"/></text:p>
          </table:table-cell>
          <table:table-cell table:style-name="表格12.A3" office:value-type="string">
            <text:p text:style-name="Standard" loext:marker-style-name="T119"><text:span text:style-name="T120">50-40=10</text:span><text:span text:style-name="T119"/></text:p>
          </table:table-cell>
        </table:table-row>
        <table:table-row table:style-name="表格12.1">
          <table:table-cell table:style-name="表格12.A2" office:value-type="string">
            <text:p text:style-name="Standard" loext:marker-style-name="T119"><text:span text:style-name="T120">⑪</text:span><text:span text:style-name="T119"/></text:p>
          </table:table-cell>
          <table:table-cell table:style-name="表格12.A2" office:value-type="string">
            <text:p text:style-name="Standard" loext:marker-style-name="T119"><text:span text:style-name="T120">+</text:span><text:span text:style-name="T119"/></text:p>
          </table:table-cell>
          <table:table-cell table:style-name="表格12.A2" office:value-type="string">
            <text:p text:style-name="Standard" loext:marker-style-name="T119"><text:span text:style-name="T122">Pop 10</text:span><text:span text:style-name="T120">, Pop -39</text:span><text:span text:style-name="T121">，計算 </text:span><text:span text:style-name="T120">-39+</text:span><text:span text:style-name="T122">10</text:span><text:span text:style-name="T120">=-29</text:span><text:span text:style-name="T121">，</text:span><text:span text:style-name="T120">Push -29</text:span></text:p>
          </table:table-cell>
          <table:table-cell table:style-name="表格12.A2" office:value-type="string">
            <text:p text:style-name="Standard" loext:marker-style-name="T119"><text:span text:style-name="T120">[-29]</text:span><text:span text:style-name="T119"/></text:p>
          </table:table-cell>
          <table:table-cell table:style-name="表格12.A2" office:value-type="string">
            <text:p text:style-name="Standard" loext:marker-style-name="T119"><text:span text:style-name="T120">-39+10=-29</text:span><text:span text:style-name="T119"/></text:p>
          </table:table-cell>
        </table:table-row>
        <table:table-row table:style-name="表格12.1">
          <table:table-cell table:style-name="表格12.A13" office:value-type="string">
            <text:p text:style-name="Standard" loext:marker-style-name="T125"><text:span text:style-name="T126">結果</text:span><text:span text:style-name="T125"/>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Standard" loext:marker-style-name="T125"><text:span text:style-name="T127">Stack </text:span><text:span text:style-name="T126">剩下 </text:span><text:span text:style-name="T127">-29</text:span>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Standard" loext:marker-style-name="T125"><text:span text:style-name="T127">★ </text:span><text:span text:style-name="T126">答案 </text:span><text:span text:style-name="T127">= -29</text:span></text:p>
          </table:table-cell>
        </table:table-row>
      </table:table>
      <text:p text:style-name="P11"/>
      <text:h text:style-name="P6" text:outline-level="2" loext:marker-style-name="T9"><text:span text:style-name="T9">114</text:span><text:span text:style-name="T10">題實戰：</text:span><text:span text:style-name="T9">2 5 × 4 2 + - 6 +</text:span></text:h>
      <text:p text:style-name="P7" loext:marker-style-name="T13"><text:span text:style-name="T14">答案 </text:span><text:span text:style-name="T57">= 10</text:span></text:p>
      <text:p text:style-name="P8"/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row table:style-name="表格13.1">
          <table:table-cell table:style-name="表格13.A1" office:value-type="string">
            <text:p text:style-name="Standard" loext:marker-style-name="T116"><text:span text:style-name="T117">步</text:span><text:span text:style-name="T116"/></text:p>
          </table:table-cell>
          <table:table-cell table:style-name="表格13.A1" office:value-type="string">
            <text:p text:style-name="Standard" loext:marker-style-name="T116"><text:span text:style-name="T117">符號</text:span><text:span text:style-name="T116"/></text:p>
          </table:table-cell>
          <table:table-cell table:style-name="表格13.A1" office:value-type="string">
            <text:p text:style-name="Standard" loext:marker-style-name="T116"><text:span text:style-name="T117">動作</text:span><text:span text:style-name="T116"/></text:p>
          </table:table-cell>
          <table:table-cell table:style-name="表格13.A1" office:value-type="string">
            <text:p text:style-name="Standard" loext:marker-style-name="T116"><text:span text:style-name="T118">Stack </text:span><text:span text:style-name="T117">狀態</text:span></text:p>
          </table:table-cell>
          <table:table-cell table:style-name="表格13.A1" office:value-type="string">
            <text:p text:style-name="Standard" loext:marker-style-name="T116"><text:span text:style-name="T117">計算</text:span><text:span text:style-name="T116"/></text:p>
          </table:table-cell>
        </table:table-row>
        <table:table-row table:style-name="表格13.1">
          <table:table-cell table:style-name="表格13.A2" office:value-type="string">
            <text:p text:style-name="Standard" loext:marker-style-name="T119"><text:span text:style-name="T120">①</text:span><text:span text:style-name="T119"/></text:p>
          </table:table-cell>
          <table:table-cell table:style-name="表格13.A2" office:value-type="string">
            <text:p text:style-name="Standard" loext:marker-style-name="T119"><text:span text:style-name="T120">2</text:span><text:span text:style-name="T119"/></text:p>
          </table:table-cell>
          <table:table-cell table:style-name="表格13.A2" office:value-type="string">
            <text:p text:style-name="Standard" loext:marker-style-name="T119"><text:span text:style-name="T120">Push 2</text:span><text:span text:style-name="T119"/></text:p>
          </table:table-cell>
          <table:table-cell table:style-name="表格13.A2" office:value-type="string">
            <text:p text:style-name="Standard" loext:marker-style-name="T119"><text:span text:style-name="T120">[2]</text:span><text:span text:style-name="T119"/>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Standard" loext:marker-style-name="T119"><text:span text:style-name="T120">②</text:span><text:span text:style-name="T119"/></text:p>
          </table:table-cell>
          <table:table-cell table:style-name="表格13.A3" office:value-type="string">
            <text:p text:style-name="Standard" loext:marker-style-name="T119"><text:span text:style-name="T120">5</text:span><text:span text:style-name="T119"/></text:p>
          </table:table-cell>
          <table:table-cell table:style-name="表格13.A3" office:value-type="string">
            <text:p text:style-name="Standard" loext:marker-style-name="T119"><text:span text:style-name="T120">Push 5 <text:s/></text:span><text:span text:style-name="T33">先</text:span><text:span text:style-name="T32">Pop</text:span><text:span text:style-name="T33">的是右</text:span></text:p>
          </table:table-cell>
          <table:table-cell table:style-name="表格13.A3" office:value-type="string">
            <text:p text:style-name="Standard" loext:marker-style-name="T119"><text:span text:style-name="T120">[2, 5]</text:span><text:span text:style-name="T119"/></text:p>
          </table:table-cell>
          <table:table-cell table:style-name="表格13.A3" office:value-type="string">
            <text:p text:style-name="Standard"/>
          </table:table-cell>
        </table:table-row>
        <text:soft-page-break/>
        <table:table-row table:style-name="表格13.1">
          <table:table-cell table:style-name="表格13.A2" office:value-type="string">
            <text:p text:style-name="Standard" loext:marker-style-name="T119"><text:span text:style-name="T120">③</text:span><text:span text:style-name="T119"/></text:p>
          </table:table-cell>
          <table:table-cell table:style-name="表格13.A2" office:value-type="string">
            <text:p text:style-name="Standard" loext:marker-style-name="T119"><text:span text:style-name="T120">×</text:span><text:span text:style-name="T119"/></text:p>
          </table:table-cell>
          <table:table-cell table:style-name="表格13.A2" office:value-type="string">
            <text:p text:style-name="Standard" loext:marker-style-name="T119"><text:span text:style-name="T128">Pop 5</text:span><text:span text:style-name="T120">, Pop 2</text:span><text:span text:style-name="T121">，計算 </text:span><text:span text:style-name="T120">2×</text:span><text:span text:style-name="T128">5</text:span><text:span text:style-name="T120">=10</text:span><text:span text:style-name="T121">，</text:span><text:span text:style-name="T120">Push 10</text:span></text:p>
          </table:table-cell>
          <table:table-cell table:style-name="表格13.A2" office:value-type="string">
            <text:p text:style-name="Standard" loext:marker-style-name="T119"><text:span text:style-name="T120">[10]</text:span><text:span text:style-name="T119"/></text:p>
          </table:table-cell>
          <table:table-cell table:style-name="表格13.A2" office:value-type="string">
            <text:p text:style-name="Standard" loext:marker-style-name="T119"><text:span text:style-name="T120">2×5=10</text:span><text:span text:style-name="T119"/></text:p>
          </table:table-cell>
        </table:table-row>
        <table:table-row table:style-name="表格13.1">
          <table:table-cell table:style-name="表格13.A3" office:value-type="string">
            <text:p text:style-name="Standard" loext:marker-style-name="T119"><text:span text:style-name="T120">④</text:span><text:span text:style-name="T119"/></text:p>
          </table:table-cell>
          <table:table-cell table:style-name="表格13.A3" office:value-type="string">
            <text:p text:style-name="Standard" loext:marker-style-name="T119"><text:span text:style-name="T120">4</text:span><text:span text:style-name="T119"/></text:p>
          </table:table-cell>
          <table:table-cell table:style-name="表格13.A3" office:value-type="string">
            <text:p text:style-name="Standard" loext:marker-style-name="T119"><text:span text:style-name="T120">Push 4</text:span><text:span text:style-name="T119"/></text:p>
          </table:table-cell>
          <table:table-cell table:style-name="表格13.A3" office:value-type="string">
            <text:p text:style-name="Standard" loext:marker-style-name="T119"><text:span text:style-name="T120">[10, 4]</text:span><text:span text:style-name="T119"/>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Standard" loext:marker-style-name="T119"><text:span text:style-name="T120">⑤</text:span><text:span text:style-name="T119"/></text:p>
          </table:table-cell>
          <table:table-cell table:style-name="表格13.A2" office:value-type="string">
            <text:p text:style-name="Standard" loext:marker-style-name="T119"><text:span text:style-name="T120">2</text:span><text:span text:style-name="T119"/></text:p>
          </table:table-cell>
          <table:table-cell table:style-name="表格13.A2" office:value-type="string">
            <text:p text:style-name="Standard" loext:marker-style-name="T119"><text:span text:style-name="T120">Push 2</text:span><text:span text:style-name="T119"/></text:p>
          </table:table-cell>
          <table:table-cell table:style-name="表格13.A2" office:value-type="string">
            <text:p text:style-name="Standard" loext:marker-style-name="T119"><text:span text:style-name="T120">[10, 4, 2]</text:span><text:span text:style-name="T119"/>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Standard" loext:marker-style-name="T119"><text:span text:style-name="T120">⑥</text:span><text:span text:style-name="T119"/></text:p>
          </table:table-cell>
          <table:table-cell table:style-name="表格13.A3" office:value-type="string">
            <text:p text:style-name="Standard" loext:marker-style-name="T119"><text:span text:style-name="T120">+</text:span><text:span text:style-name="T119"/></text:p>
          </table:table-cell>
          <table:table-cell table:style-name="表格13.A3" office:value-type="string">
            <text:p text:style-name="Standard" loext:marker-style-name="T119"><text:span text:style-name="T128">Pop 2</text:span><text:span text:style-name="T120">, Pop 4</text:span><text:span text:style-name="T121">，計算 </text:span><text:span text:style-name="T120">4+</text:span><text:span text:style-name="T128">2</text:span><text:span text:style-name="T120">=6</text:span><text:span text:style-name="T121">，</text:span><text:span text:style-name="T120">Push 6</text:span></text:p>
          </table:table-cell>
          <table:table-cell table:style-name="表格13.A3" office:value-type="string">
            <text:p text:style-name="Standard" loext:marker-style-name="T119"><text:span text:style-name="T120">[10, 6]</text:span><text:span text:style-name="T119"/></text:p>
          </table:table-cell>
          <table:table-cell table:style-name="表格13.A3" office:value-type="string">
            <text:p text:style-name="Standard" loext:marker-style-name="T119"><text:span text:style-name="T120">4+2=6</text:span><text:span text:style-name="T119"/></text:p>
          </table:table-cell>
        </table:table-row>
        <table:table-row table:style-name="表格13.1">
          <table:table-cell table:style-name="表格13.A2" office:value-type="string">
            <text:p text:style-name="Standard" loext:marker-style-name="T119"><text:span text:style-name="T120">⑦</text:span><text:span text:style-name="T119"/></text:p>
          </table:table-cell>
          <table:table-cell table:style-name="表格13.A2" office:value-type="string">
            <text:p text:style-name="Standard" loext:marker-style-name="T119"><text:span text:style-name="T120">-</text:span><text:span text:style-name="T119"/></text:p>
          </table:table-cell>
          <table:table-cell table:style-name="表格13.A2" office:value-type="string">
            <text:p text:style-name="Standard" loext:marker-style-name="T119"><text:span text:style-name="T128">Pop 6</text:span><text:span text:style-name="T120">, Pop 10</text:span><text:span text:style-name="T121">，計算 </text:span><text:span text:style-name="T120">10-</text:span><text:span text:style-name="T128">6</text:span><text:span text:style-name="T120">=4</text:span><text:span text:style-name="T121">，</text:span><text:span text:style-name="T120">Push 4</text:span></text:p>
          </table:table-cell>
          <table:table-cell table:style-name="表格13.A2" office:value-type="string">
            <text:p text:style-name="Standard" loext:marker-style-name="T119"><text:span text:style-name="T120">[4]</text:span><text:span text:style-name="T119"/></text:p>
          </table:table-cell>
          <table:table-cell table:style-name="表格13.A2" office:value-type="string">
            <text:p text:style-name="Standard" loext:marker-style-name="T119"><text:span text:style-name="T120">10-6=4</text:span><text:span text:style-name="T119"/></text:p>
          </table:table-cell>
        </table:table-row>
        <table:table-row table:style-name="表格13.1">
          <table:table-cell table:style-name="表格13.A3" office:value-type="string">
            <text:p text:style-name="Standard" loext:marker-style-name="T119"><text:span text:style-name="T120">⑧</text:span><text:span text:style-name="T119"/></text:p>
          </table:table-cell>
          <table:table-cell table:style-name="表格13.A3" office:value-type="string">
            <text:p text:style-name="Standard" loext:marker-style-name="T119"><text:span text:style-name="T120">6</text:span><text:span text:style-name="T119"/></text:p>
          </table:table-cell>
          <table:table-cell table:style-name="表格13.A3" office:value-type="string">
            <text:p text:style-name="Standard" loext:marker-style-name="T119"><text:span text:style-name="T120">Push 6</text:span><text:span text:style-name="T119"/></text:p>
          </table:table-cell>
          <table:table-cell table:style-name="表格13.A3" office:value-type="string">
            <text:p text:style-name="Standard" loext:marker-style-name="T119"><text:span text:style-name="T120">[4, 6]</text:span><text:span text:style-name="T119"/>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Standard" loext:marker-style-name="T119"><text:span text:style-name="T120">⑨</text:span><text:span text:style-name="T119"/></text:p>
          </table:table-cell>
          <table:table-cell table:style-name="表格13.A2" office:value-type="string">
            <text:p text:style-name="Standard" loext:marker-style-name="T119"><text:span text:style-name="T120">+</text:span><text:span text:style-name="T119"/></text:p>
          </table:table-cell>
          <table:table-cell table:style-name="表格13.A2" office:value-type="string">
            <text:p text:style-name="Standard" loext:marker-style-name="T119"><text:span text:style-name="T128">Pop</text:span><text:span text:style-name="T120"> 6, Pop 4</text:span><text:span text:style-name="T121">，計算 </text:span><text:span text:style-name="T120">4+</text:span><text:span text:style-name="T128">6</text:span><text:span text:style-name="T120">=10</text:span><text:span text:style-name="T121">，</text:span><text:span text:style-name="T120">Push 10</text:span></text:p>
          </table:table-cell>
          <table:table-cell table:style-name="表格13.A2" office:value-type="string">
            <text:p text:style-name="Standard" loext:marker-style-name="T119"><text:span text:style-name="T120">[10]</text:span><text:span text:style-name="T119"/></text:p>
          </table:table-cell>
          <table:table-cell table:style-name="表格13.A2" office:value-type="string">
            <text:p text:style-name="Standard" loext:marker-style-name="T119"><text:span text:style-name="T120">4+6=10</text:span><text:span text:style-name="T119"/></text:p>
          </table:table-cell>
        </table:table-row>
        <table:table-row table:style-name="表格13.1">
          <table:table-cell table:style-name="表格13.A11" office:value-type="string">
            <text:p text:style-name="Standard" loext:marker-style-name="T125"><text:span text:style-name="T126">結果</text:span><text:span text:style-name="T125"/>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Standard" loext:marker-style-name="T125"><text:span text:style-name="T127">Stack </text:span><text:span text:style-name="T126">剩下 </text:span><text:span text:style-name="T127">10</text:span>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Standard" loext:marker-style-name="T125"><text:span text:style-name="T127">★ </text:span><text:span text:style-name="T126">答案 </text:span><text:span text:style-name="T127">= 10</text:span></text:p>
          </table:table-cell>
        </table:table-row>
      </table:table>
      <text:p text:style-name="Standard"/>
      <text:h text:style-name="P16" text:outline-level="1" loext:marker-style-name="T7"><text:span text:style-name="T8">第五部分：大範例完整解析（答案 </text:span><text:span text:style-name="T7">198</text:span><text:span text:style-name="T8">）</text:span></text:h>
      <text:p text:style-name="P5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9" loext:marker-style-name="T26"><text:span text:style-name="T26">算式：((6×(5-3))-(1+2))×(((4+2)÷3)+(5×4))</text:span><text:span text:style-name="T26"/></text:p>
          </table:table-cell>
        </table:table-row>
      </table:table>
      <text:p text:style-name="P17"/>
      <text:h text:style-name="P6" text:outline-level="2" loext:marker-style-name="T9"><text:span text:style-name="T10">建樹（一步一步拆解）</text:span><text:span text:style-name="T9"/></text:h>
      <text:p text:style-name="P9"><text:span text:style-name="T14">步驟 </text:span><text:span text:style-name="T57">1</text:span><text:span text:style-name="T14">：</text:span><text:span text:style-name="T95">最外層最後算</text:span><text:span text:style-name="T12">：</text:span><text:span text:style-name="T101">× <text:s/>→ <text:s/></text:span><text:span text:style-name="T96">根節點 </text:span><text:span text:style-name="T101">= ×</text:span></text:p>
      <text:p text:style-name="P9"><text:span text:style-name="T14">步驟 </text:span><text:span text:style-name="T57">2</text:span><text:span text:style-name="T14">：</text:span><text:span text:style-name="T12">左子樹：</text:span><text:span text:style-name="T15">((6×(5-3))-(1+2))</text:span><text:span text:style-name="T12">，</text:span><text:span text:style-name="T95">最後算 </text:span><text:span text:style-name="T129">-</text:span></text:p>
      <text:p text:style-name="P9"><text:span text:style-name="T14">步驟 </text:span><text:span text:style-name="T57">3</text:span><text:span text:style-name="T14">：</text:span><text:span text:style-name="T12">左子樹左邊：</text:span><text:span text:style-name="T15">6×(5-3)</text:span><text:span text:style-name="T12">，</text:span><text:span text:style-name="T95">最後算 </text:span><text:span text:style-name="T129">×</text:span></text:p>
      <text:p text:style-name="P9"><text:span text:style-name="T14">步驟 </text:span><text:span text:style-name="T57">4</text:span><text:span text:style-name="T14">：</text:span><text:span text:style-name="T12">再拆：</text:span><text:span text:style-name="T15">5-3 </text:span><text:span text:style-name="T95">最後算 </text:span><text:span text:style-name="T129">-</text:span><text:span text:style-name="T12">，葉節點 </text:span><text:span text:style-name="T15">5 </text:span><text:span text:style-name="T12">和 </text:span><text:span text:style-name="T15">3</text:span></text:p>
      <text:p text:style-name="P9"><text:span text:style-name="T14">步驟 </text:span><text:span text:style-name="T57">5</text:span><text:span text:style-name="T14">：</text:span><text:span text:style-name="T12">左子樹右邊：</text:span><text:span text:style-name="T15">1+2</text:span><text:span text:style-name="T12">，葉節點 </text:span><text:span text:style-name="T15">1 </text:span><text:span text:style-name="T12">和 </text:span><text:span text:style-name="T15">2</text:span></text:p>
      <text:p text:style-name="P9"><text:span text:style-name="T14">步驟 </text:span><text:span text:style-name="T57">6</text:span><text:span text:style-name="T14">：</text:span><text:span text:style-name="T12">右子樹：</text:span><text:span text:style-name="T15">((4+2)÷3)+(5×4)</text:span><text:span text:style-name="T12">，</text:span><text:span text:style-name="T95">最後算 </text:span><text:span text:style-name="T129">+</text:span></text:p>
      <text:p text:style-name="P9"><text:span text:style-name="T14">步驟 </text:span><text:span text:style-name="T57">7</text:span><text:span text:style-name="T14">：</text:span><text:span text:style-name="T12">右子樹左邊：</text:span><text:span text:style-name="T15">(4+2)÷3</text:span><text:span text:style-name="T12">，</text:span><text:span text:style-name="T95">最後算 </text:span><text:span text:style-name="T129">÷</text:span></text:p>
      <text:p text:style-name="P9"><text:span text:style-name="T14">步驟 </text:span><text:span text:style-name="T57">8</text:span><text:span text:style-name="T14">：</text:span><text:span text:style-name="T12">再拆：</text:span><text:span text:style-name="T15">4+2</text:span><text:span text:style-name="T12">，葉節點 </text:span><text:span text:style-name="T15">4 </text:span><text:span text:style-name="T12">和 </text:span><text:span text:style-name="T15">2</text:span></text:p>
      <text:p text:style-name="P9"><text:span text:style-name="T14">步驟 </text:span><text:span text:style-name="T57">9</text:span><text:span text:style-name="T14">：</text:span><text:span text:style-name="T12">右子樹右邊：</text:span><text:span text:style-name="T15">5×4</text:span><text:span text:style-name="T12">，葉節點 </text:span><text:span text:style-name="T15">5 </text:span><text:span text:style-name="T12">和 </text:span><text:span text:style-name="T15">4</text:span></text:p>
      <text:p text:style-name="P17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30" loext:marker-style-name="T13"><text:span text:style-name="T14">完整表達式樹</text:span><text:span text:style-name="T13"/></text:p>
            <text:p text:style-name="P31" loext:marker-style-name="T130"><text:span text:style-name="T130"><text:s text:c="19"/>* <text:s text:c="30"/>&lt;- 根節點</text:span><text:span text:style-name="T130"/></text:p>
            <text:p text:style-name="P25" loext:marker-style-name="T130"><text:span text:style-name="T130"><text:s text:c="17"/>/ <text:s text:c="2"/>\</text:span><text:span text:style-name="T130"/></text:p>
            <text:p text:style-name="P25" loext:marker-style-name="T130"><text:span text:style-name="T130"><text:s text:c="10"/>- <text:s text:c="16"/>+</text:span><text:span text:style-name="T130"/></text:p>
            <text:p text:style-name="P25" loext:marker-style-name="T130"><text:span text:style-name="T130"><text:s text:c="8"/>/ <text:s text:c="2"/>\ <text:s text:c="12"/>/ <text:s text:c="2"/>\</text:span><text:span text:style-name="T130"/></text:p>
            <text:p text:style-name="P25" loext:marker-style-name="T130"><text:span text:style-name="T130"><text:s text:c="5"/>* <text:s text:c="8"/>+ <text:s text:c="6"/>/ <text:s text:c="8"/>*</text:span><text:span text:style-name="T130"/></text:p>
            <text:p text:style-name="P25" loext:marker-style-name="T130"><text:span text:style-name="T130"><text:s text:c="3"/>/ <text:s text:c="2"/>\ <text:s text:c="4"/>/ <text:s text:c="2"/>\ <text:s text:c="2"/>/ <text:s text:c="2"/>\ <text:s text:c="4"/>/ <text:s text:c="2"/>\</text:span><text:span text:style-name="T130"/></text:p>
            <text:p text:style-name="P26" loext:marker-style-name="T130"><text:span text:style-name="T130"><text:s text:c="2"/>6 <text:s text:c="4"/>- <text:s text:c="2"/>1 <text:s text:c="4"/>2 + <text:s text:c="4"/>3 <text:s text:c="2"/>5 <text:s text:c="4"/>4</text:span><text:span text:style-name="T130"/></text:p>
            <text:p text:style-name="P26" loext:marker-style-name="T130"><text:span text:style-name="T130"><text:s text:c="6"/>/ <text:s text:c="2"/>\ <text:s text:c="6"/>/ <text:s text:c="2"/>\</text:span><text:span text:style-name="T130"/></text:p>
            <text:p text:style-name="P26" loext:marker-style-name="T130"><text:span text:style-name="T130"><text:s text:c="5"/>5 <text:s text:c="4"/>3 <text:s text:c="4"/>4 <text:s text:c="4"/>2</text:span><text:span text:style-name="T130"/></text:p>
          </table:table-cell>
        </table:table-row>
      </table:table>
      <text:p text:style-name="P22"/>
      <text:h text:style-name="P6" text:outline-level="2" loext:marker-style-name="T9"><text:span text:style-name="T9">Postorder </text:span><text:span text:style-name="T10">求值（</text:span><text:span text:style-name="T9">Bottom-Up</text:span><text:span text:style-name="T10">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row table:style-name="表格16.1">
          <table:table-cell table:style-name="表格16.A1" office:value-type="string">
            <text:p text:style-name="Standard" loext:marker-style-name="T34"><text:span text:style-name="T35">步</text:span><text:span text:style-name="T34"/></text:p>
          </table:table-cell>
          <table:table-cell table:style-name="表格16.A1" office:value-type="string">
            <text:p text:style-name="Standard" loext:marker-style-name="T34"><text:span text:style-name="T35">計算內容</text:span><text:span text:style-name="T34"/></text:p>
          </table:table-cell>
          <table:table-cell table:style-name="表格16.A1" office:value-type="string">
            <text:p text:style-name="Standard" loext:marker-style-name="T34"><text:span text:style-name="T35">結果</text:span><text:span text:style-name="T34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72"><text:span text:style-name="T85">①</text:span><text:span text:style-name="T72"/></text:p>
          </table:table-cell>
          <table:table-cell table:style-name="表格16.A2" office:value-type="string">
            <text:p text:style-name="Standard" loext:marker-style-name="T72"><text:span text:style-name="T85">5-3</text:span><text:span text:style-name="T72"/></text:p>
          </table:table-cell>
          <table:table-cell table:style-name="表格16.A2" office:value-type="string">
            <text:p text:style-name="Standard" loext:marker-style-name="T72"><text:span text:style-name="T85">= 2</text:span><text:span text:style-name="T72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72"><text:span text:style-name="T85">②</text:span><text:span text:style-name="T72"/></text:p>
          </table:table-cell>
          <table:table-cell table:style-name="表格16.A3" office:value-type="string">
            <text:p text:style-name="Standard" loext:marker-style-name="T72"><text:span text:style-name="T85">6×2</text:span><text:span text:style-name="T72"/></text:p>
          </table:table-cell>
          <table:table-cell table:style-name="表格16.A3" office:value-type="string">
            <text:p text:style-name="Standard" loext:marker-style-name="T72"><text:span text:style-name="T85">= 12</text:span><text:span text:style-name="T72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72"><text:span text:style-name="T85">③</text:span><text:span text:style-name="T72"/></text:p>
          </table:table-cell>
          <table:table-cell table:style-name="表格16.A2" office:value-type="string">
            <text:p text:style-name="Standard" loext:marker-style-name="T72"><text:span text:style-name="T85">1+2</text:span><text:span text:style-name="T72"/></text:p>
          </table:table-cell>
          <table:table-cell table:style-name="表格16.A2" office:value-type="string">
            <text:p text:style-name="Standard" loext:marker-style-name="T72"><text:span text:style-name="T85">= 3</text:span><text:span text:style-name="T72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72"><text:span text:style-name="T85">④</text:span><text:span text:style-name="T72"/></text:p>
          </table:table-cell>
          <table:table-cell table:style-name="表格16.A3" office:value-type="string">
            <text:p text:style-name="Standard" loext:marker-style-name="T72"><text:span text:style-name="T85">12-3</text:span><text:span text:style-name="T74">（左子樹完成）</text:span></text:p>
          </table:table-cell>
          <table:table-cell table:style-name="表格16.A3" office:value-type="string">
            <text:p text:style-name="Standard" loext:marker-style-name="T131"><text:span text:style-name="T132">= 9</text:span><text:span text:style-name="T131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72"><text:span text:style-name="T85">⑤</text:span><text:span text:style-name="T72"/></text:p>
          </table:table-cell>
          <table:table-cell table:style-name="表格16.A2" office:value-type="string">
            <text:p text:style-name="Standard" loext:marker-style-name="T72"><text:span text:style-name="T85">4+2</text:span><text:span text:style-name="T72"/></text:p>
          </table:table-cell>
          <table:table-cell table:style-name="表格16.A2" office:value-type="string">
            <text:p text:style-name="Standard" loext:marker-style-name="T72"><text:span text:style-name="T85">= 6</text:span><text:span text:style-name="T72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72"><text:span text:style-name="T85">⑥</text:span><text:span text:style-name="T72"/></text:p>
          </table:table-cell>
          <table:table-cell table:style-name="表格16.A3" office:value-type="string">
            <text:p text:style-name="Standard" loext:marker-style-name="T72"><text:span text:style-name="T85">6÷3</text:span><text:span text:style-name="T72"/></text:p>
          </table:table-cell>
          <table:table-cell table:style-name="表格16.A3" office:value-type="string">
            <text:p text:style-name="Standard" loext:marker-style-name="T72"><text:span text:style-name="T85">= 2</text:span><text:span text:style-name="T72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72"><text:span text:style-name="T85">⑦</text:span><text:span text:style-name="T72"/></text:p>
          </table:table-cell>
          <table:table-cell table:style-name="表格16.A2" office:value-type="string">
            <text:p text:style-name="Standard" loext:marker-style-name="T72"><text:span text:style-name="T85">5×4</text:span><text:span text:style-name="T72"/></text:p>
          </table:table-cell>
          <table:table-cell table:style-name="表格16.A2" office:value-type="string">
            <text:p text:style-name="Standard" loext:marker-style-name="T72"><text:span text:style-name="T85">= 20</text:span><text:span text:style-name="T72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72"><text:span text:style-name="T85">⑧</text:span><text:span text:style-name="T72"/></text:p>
          </table:table-cell>
          <table:table-cell table:style-name="表格16.A3" office:value-type="string">
            <text:p text:style-name="Standard" loext:marker-style-name="T72"><text:span text:style-name="T85">2+20</text:span><text:span text:style-name="T74">（右子樹完成）</text:span></text:p>
          </table:table-cell>
          <table:table-cell table:style-name="表格16.A3" office:value-type="string">
            <text:p text:style-name="Standard" loext:marker-style-name="T131"><text:span text:style-name="T132">= 22</text:span><text:span text:style-name="T131"/></text:p>
          </table:table-cell>
        </table:table-row>
        <table:table-row table:style-name="表格16.1">
          <table:table-cell table:style-name="表格16.A10" office:value-type="string">
            <text:p text:style-name="Standard" loext:marker-style-name="T133"><text:span text:style-name="T134">⑨</text:span><text:span text:style-name="T133"/></text:p>
          </table:table-cell>
          <table:table-cell table:style-name="表格16.A10" office:value-type="string">
            <text:p text:style-name="Standard" loext:marker-style-name="T133"><text:span text:style-name="T134">9×22</text:span><text:span text:style-name="T135">（根節點）</text:span></text:p>
          </table:table-cell>
          <table:table-cell table:style-name="表格16.A10" office:value-type="string">
            <text:p text:style-name="Standard" loext:marker-style-name="T133"><text:span text:style-name="T134">= 198 ★</text:span><text:span text:style-name="T133"/></text:p>
          </table:table-cell>
        </table:table-row>
      </table:table>
      <text:p text:style-name="P22"/>
      <table:table table:name="表格17" table:style-name="表格17">
        <table:table-column table:style-name="表格17.A"/>
        <text:soft-page-break/>
        <table:table-row table:style-name="表格17.1">
          <table:table-cell table:style-name="表格17.A1" office:value-type="string">
            <text:p text:style-name="P15" loext:marker-style-name="T98"><text:span text:style-name="T100">為什麼用 </text:span><text:span text:style-name="T99">Postorder</text:span><text:span text:style-name="T100">？這個範例完美說明了一條鏈：</text:span></text:p>
            <text:p text:style-name="P32" loext:marker-style-name="T13"><text:span text:style-name="T57">Expression Tree <text:s/>→ <text:s/>Postorder </text:span><text:span text:style-name="T14">走訪 <text:s/>→ <text:s/></text:span><text:span text:style-name="T57">Postfix </text:span><text:span text:style-name="T14">算式 <text:s/>→ <text:s/></text:span><text:span text:style-name="T57">Stack </text:span><text:span text:style-name="T14">求值 <text:s/>→ <text:s/>答案 </text:span><text:span text:style-name="T57">198</text:span></text:p>
          </table:table-cell>
        </table:table-row>
      </table:table>
      <text:p text:style-name="Standard"/>
      <text:h text:style-name="P16" text:outline-level="1" loext:marker-style-name="T7"><text:span text:style-name="T8">第六部分：</text:span><text:span text:style-name="T93">Infix </text:span><text:span text:style-name="T94">轉 </text:span><text:span text:style-name="T93">Postfix</text:span><text:span text:style-name="T8">（超高頻考題）</text:span></text:h>
      <text:p text:style-name="P5"/>
      <text:p text:style-name="P7" loext:marker-style-name="T11"><text:span text:style-name="T12">這是資訊類考試最常考的題型之一，必須熟練。</text:span><text:span text:style-name="T11"/></text:p>
      <text:p text:style-name="P17"/>
      <text:h text:style-name="P6" text:outline-level="2" loext:marker-style-name="T9"><text:span text:style-name="T10">優先權表（考前必背）</text:span><text:span text:style-name="T9"/></text:h>
      <table:table table:name="表格18" table:style-name="表格18">
        <table:table-column table:style-name="表格18.A" table:number-columns-repeated="2"/>
        <table:table-row table:style-name="表格18.1">
          <table:table-cell table:style-name="表格18.A1" office:value-type="string">
            <text:p text:style-name="Standard" loext:marker-style-name="T34"><text:span text:style-name="T35">運算子</text:span><text:span text:style-name="T34"/></text:p>
          </table:table-cell>
          <table:table-cell table:style-name="表格18.A1" office:value-type="string">
            <text:p text:style-name="Standard" loext:marker-style-name="T34"><text:span text:style-name="T35">優先權（數字越大越高）</text:span><text:span text:style-name="T34"/></text:p>
          </table:table-cell>
        </table:table-row>
        <table:table-row table:style-name="表格18.1">
          <table:table-cell table:style-name="表格18.A2" office:value-type="string">
            <text:p text:style-name="Standard" loext:marker-style-name="T131"><text:span text:style-name="T132">× <text:s/>÷</text:span><text:span text:style-name="T136">（乘、除）</text:span></text:p>
          </table:table-cell>
          <table:table-cell table:style-name="表格18.A2" office:value-type="string">
            <text:p text:style-name="Standard" loext:marker-style-name="T137"><text:span text:style-name="T73">優先權 </text:span><text:span text:style-name="T138">2</text:span><text:span text:style-name="T73">（高）</text:span></text:p>
          </table:table-cell>
        </table:table-row>
        <table:table-row table:style-name="表格18.1">
          <table:table-cell table:style-name="表格18.A3" office:value-type="string">
            <text:p text:style-name="Standard" loext:marker-style-name="T139"><text:span text:style-name="T140">+ -</text:span><text:span text:style-name="T141">（加、減）</text:span></text:p>
          </table:table-cell>
          <table:table-cell table:style-name="表格18.A3" office:value-type="string">
            <text:p text:style-name="Standard" loext:marker-style-name="T142"><text:span text:style-name="T112">優先權 </text:span><text:span text:style-name="T113">1</text:span><text:span text:style-name="T112">（低）</text:span></text:p>
          </table:table-cell>
        </table:table-row>
        <table:table-row table:style-name="表格18.1">
          <table:table-cell table:style-name="表格18.A2" office:value-type="string">
            <text:p text:style-name="Standard" loext:marker-style-name="T143"><text:span text:style-name="T33">（ <text:s/>）（括號）</text:span><text:span text:style-name="T143"/></text:p>
          </table:table-cell>
          <table:table-cell table:style-name="表格18.A2" office:value-type="string">
            <text:p text:style-name="Standard" loext:marker-style-name="T143"><text:span text:style-name="T33">特殊處理（見規則）</text:span><text:span text:style-name="T143"/></text:p>
          </table:table-cell>
        </table:table-row>
      </table:table>
      <text:p text:style-name="P22"/>
      <text:h text:style-name="P6" text:outline-level="2" loext:marker-style-name="T9"><text:span text:style-name="T10">演算法步驟（</text:span><text:span text:style-name="T9">5</text:span><text:span text:style-name="T10">條規則）</text:span>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15" loext:marker-style-name="T11"><text:span text:style-name="T12">規則 </text:span><text:span text:style-name="T15">1</text:span><text:span text:style-name="T12">：</text:span><text:span text:style-name="T95">遇到 運算元（</text:span><text:span text:style-name="T129">A</text:span><text:span text:style-name="T95">、</text:span><text:span text:style-name="T129">B</text:span><text:span text:style-name="T95">、</text:span><text:span text:style-name="T129">1</text:span><text:span text:style-name="T95">、</text:span><text:span text:style-name="T129">2 </text:span><text:span text:style-name="T95">等）</text:span><text:span text:style-name="T12">→ </text:span><text:span text:style-name="T144">直接輸出到結果</text:span></text:p>
            <text:p text:style-name="P29" loext:marker-style-name="T11"><text:span text:style-name="T12">規則 </text:span><text:span text:style-name="T15">2</text:span><text:span text:style-name="T12">：</text:span><text:span text:style-name="T145">遇到 左括號 </text:span><text:span text:style-name="T146">(</text:span><text:span text:style-name="T15"> → </text:span><text:span text:style-name="T12">直接 </text:span><text:span text:style-name="T15">Push </text:span><text:span text:style-name="T12">進 </text:span><text:span text:style-name="T15">Stack</text:span></text:p>
            <text:p text:style-name="P29" loext:marker-style-name="T11"><text:span text:style-name="T12">規則 </text:span><text:span text:style-name="T15">3</text:span><text:span text:style-name="T12">：</text:span><text:span text:style-name="T147">遇到 右括號 </text:span><text:span text:style-name="T148">)</text:span><text:span text:style-name="T15"> → </text:span><text:span text:style-name="T63">持續 </text:span><text:span text:style-name="T97">Pop </text:span><text:span text:style-name="T63">並輸出</text:span><text:span text:style-name="T12">，</text:span><text:span text:style-name="T149">直到遇見左括號 </text:span><text:span text:style-name="T150">( </text:span><text:span text:style-name="T149">為止</text:span><text:span text:style-name="T12">（</text:span><text:span text:style-name="T151">括號本身不輸出</text:span><text:span text:style-name="T12">）</text:span></text:p>
            <text:p text:style-name="P29" loext:marker-style-name="T11"><text:span text:style-name="T12">規則 </text:span><text:span text:style-name="T15">4</text:span><text:span text:style-name="T12">：</text:span><text:span text:style-name="T96">遇到 運算子（</text:span><text:span text:style-name="T101">+</text:span><text:span text:style-name="T96">、</text:span><text:span text:style-name="T101">-</text:span><text:span text:style-name="T96">、</text:span><text:span text:style-name="T101">×</text:span><text:span text:style-name="T96">、</text:span><text:span text:style-name="T101">÷</text:span><text:span text:style-name="T96">）</text:span><text:span text:style-name="T12">→ </text:span><text:span text:style-name="T18">若 </text:span><text:span text:style-name="T19">Stack </text:span><text:span text:style-name="T18">頂端運算子優先權 ≥ 目前運算子</text:span><text:span text:style-name="T12">，</text:span><text:span text:style-name="T63">先 </text:span><text:span text:style-name="T97">Pop </text:span><text:span text:style-name="T63">再 </text:span><text:span text:style-name="T97">Push</text:span><text:span text:style-name="T63">；否則直接 </text:span><text:span text:style-name="T97">Push</text:span><text:span text:style-name="T152">(</text:span><text:span text:style-name="T153">當看到新的運算子時：如果 </text:span><text:span text:style-name="T152">Stack </text:span><text:span text:style-name="T153">裡面的運算子比它更早算就：先拿</text:span><text:span text:style-name="T152">Stack </text:span><text:span text:style-name="T153">裡面的運算子來輸出</text:span><text:span text:style-name="T152">)</text:span></text:p>
            <text:p text:style-name="P28" loext:marker-style-name="T11"><text:span text:style-name="T12">規則 </text:span><text:span text:style-name="T15">5</text:span><text:span text:style-name="T12">：</text:span><text:span text:style-name="T95">讀取結束 </text:span><text:span text:style-name="T12">→ </text:span><text:span text:style-name="T144">把 </text:span><text:span text:style-name="T154">Stack </text:span><text:span text:style-name="T144">剩餘的所有運算子全部 </text:span><text:span text:style-name="T154">Pop </text:span><text:span text:style-name="T144">並輸出</text:span></text:p>
          </table:table-cell>
        </table:table-row>
      </table:table>
      <text:p text:style-name="P22"/>
      <text:h text:style-name="P6" text:outline-level="2" loext:marker-style-name="T9"><text:span text:style-name="T9">5 </text:span><text:span text:style-name="T10">道練習題完整解析</text:span></text:h>
      <text:p text:style-name="P23" loext:marker-style-name="T86"><text:span text:style-name="T88">題目 </text:span><text:span text:style-name="T87">1</text:span><text:span text:style-name="T88">：</text:span><text:span text:style-name="T155">A+B*C</text:span></text:p>
      <table:table table:name="表格20" table:style-name="表格20">
        <table:table-column table:style-name="表格20.A"/>
        <table:table-column table:style-name="表格20.B"/>
        <table:table-column table:style-name="表格20.C"/>
        <table:table-row table:style-name="表格20.1">
          <table:table-cell table:style-name="表格20.A1" office:value-type="string">
            <text:p text:style-name="Standard" loext:marker-style-name="T116"><text:span text:style-name="T117">讀入</text:span><text:span text:style-name="T116"/></text:p>
          </table:table-cell>
          <table:table-cell table:style-name="表格20.A1" office:value-type="string">
            <text:p text:style-name="Standard" loext:marker-style-name="T116"><text:span text:style-name="T117">輸出</text:span><text:span text:style-name="T116"/></text:p>
          </table:table-cell>
          <table:table-cell table:style-name="表格20.A1" office:value-type="string">
            <text:p text:style-name="Standard" loext:marker-style-name="T116"><text:span text:style-name="T118">Stack</text:span><text:span text:style-name="T116"/></text:p>
          </table:table-cell>
        </table:table-row>
        <table:table-row table:style-name="表格20.1">
          <table:table-cell table:style-name="表格20.A2" office:value-type="string">
            <text:p text:style-name="Standard" loext:marker-style-name="T156"><text:span text:style-name="T156">A</text:span><text:span text:style-name="T156"/></text:p>
          </table:table-cell>
          <table:table-cell table:style-name="表格20.A2" office:value-type="string">
            <text:p text:style-name="Standard" loext:marker-style-name="T156"><text:span text:style-name="T156">A</text:span><text:span text:style-name="T156"/></text:p>
          </table:table-cell>
          <table:table-cell table:style-name="表格20.A2" office:value-type="string">
            <text:p text:style-name="Standard" loext:marker-style-name="T156"><text:span text:style-name="T156">（空）</text:span><text:span text:style-name="T156"/></text:p>
          </table:table-cell>
        </table:table-row>
        <table:table-row table:style-name="表格20.1">
          <table:table-cell table:style-name="表格20.A3" office:value-type="string">
            <text:p text:style-name="Standard" loext:marker-style-name="T156"><text:span text:style-name="T156">+</text:span><text:span text:style-name="T156"/></text:p>
          </table:table-cell>
          <table:table-cell table:style-name="表格20.A3" office:value-type="string">
            <text:p text:style-name="Standard" loext:marker-style-name="T156"><text:span text:style-name="T156">A</text:span><text:span text:style-name="T156"/></text:p>
          </table:table-cell>
          <table:table-cell table:style-name="表格20.A3" office:value-type="string">
            <text:p text:style-name="Standard" loext:marker-style-name="T156"><text:span text:style-name="T156">+</text:span><text:span text:style-name="T156"/></text:p>
          </table:table-cell>
        </table:table-row>
        <table:table-row table:style-name="表格20.1">
          <table:table-cell table:style-name="表格20.A2" office:value-type="string">
            <text:p text:style-name="Standard" loext:marker-style-name="T156"><text:span text:style-name="T156">B</text:span><text:span text:style-name="T156"/></text:p>
          </table:table-cell>
          <table:table-cell table:style-name="表格20.A2" office:value-type="string">
            <text:p text:style-name="Standard" loext:marker-style-name="T156"><text:span text:style-name="T156">AB</text:span><text:span text:style-name="T156"/></text:p>
          </table:table-cell>
          <table:table-cell table:style-name="表格20.A2" office:value-type="string">
            <text:p text:style-name="Standard" loext:marker-style-name="T156"><text:span text:style-name="T156">+</text:span><text:span text:style-name="T156"/></text:p>
          </table:table-cell>
        </table:table-row>
        <table:table-row table:style-name="表格20.1">
          <table:table-cell table:style-name="表格20.A3" office:value-type="string">
            <text:p text:style-name="Standard" loext:marker-style-name="T156"><text:span text:style-name="T156">*</text:span><text:span text:style-name="T156"/></text:p>
          </table:table-cell>
          <table:table-cell table:style-name="表格20.A3" office:value-type="string">
            <text:p text:style-name="Standard" loext:marker-style-name="T156"><text:span text:style-name="T156">AB</text:span><text:span text:style-name="T156"/></text:p>
          </table:table-cell>
          <table:table-cell table:style-name="表格20.A3" office:value-type="string">
            <text:p text:style-name="Standard" loext:marker-style-name="T156"><text:span text:style-name="T157">+ *</text:span><text:span text:style-name="T156"> <text:s text:c="4"/>(</text:span><text:span text:style-name="T158">* &gt; +，直接放入</text:span><text:span text:style-name="T156">)</text:span></text:p>
          </table:table-cell>
        </table:table-row>
        <table:table-row table:style-name="表格20.1">
          <table:table-cell table:style-name="表格20.A2" office:value-type="string">
            <text:p text:style-name="Standard" loext:marker-style-name="T156"><text:span text:style-name="T156">C</text:span><text:span text:style-name="T156"/></text:p>
          </table:table-cell>
          <table:table-cell table:style-name="表格20.A2" office:value-type="string">
            <text:p text:style-name="Standard" loext:marker-style-name="T156"><text:span text:style-name="T156">ABC</text:span><text:span text:style-name="T156"/></text:p>
          </table:table-cell>
          <table:table-cell table:style-name="表格20.A2" office:value-type="string">
            <text:p text:style-name="Standard" loext:marker-style-name="T156"><text:span text:style-name="T156">+ *</text:span><text:span text:style-name="T156"/></text:p>
          </table:table-cell>
        </table:table-row>
        <table:table-row table:style-name="表格20.1">
          <table:table-cell table:style-name="表格20.A3" office:value-type="string">
            <text:p text:style-name="Standard" loext:marker-style-name="T156"><text:span text:style-name="T156">結束</text:span><text:span text:style-name="T156"/></text:p>
          </table:table-cell>
          <table:table-cell table:style-name="表格20.A3" office:value-type="string">
            <text:p text:style-name="Standard" loext:marker-style-name="T156"><text:span text:style-name="T156">ABC</text:span><text:span text:style-name="T159">*+</text:span></text:p>
          </table:table-cell>
          <table:table-cell table:style-name="表格20.A3" office:value-type="string">
            <text:p text:style-name="Standard" loext:marker-style-name="T156"><text:span text:style-name="T156">（全部 </text:span><text:span text:style-name="T160">Pop：先 *，再 +</text:span><text:span text:style-name="T156">）</text:span></text:p>
          </table:table-cell>
        </table:table-row>
        <table:table-row table:style-name="表格20.1">
          <table:table-cell table:style-name="表格20.A8" table:number-columns-spanned="3" office:value-type="string">
            <text:p text:style-name="P10" loext:marker-style-name="T161"><text:span text:style-name="T161">★ 答案：</text:span><text:span text:style-name="T162">ABC*+</text:span></text:p>
          </table:table-cell>
          <table:covered-table-cell/>
          <table:covered-table-cell/>
        </table:table-row>
      </table:table>
      <text:p text:style-name="P17"/>
      <text:p text:style-name="P23" loext:marker-style-name="T86"><text:span text:style-name="T88">題目 </text:span><text:span text:style-name="T87">2</text:span><text:span text:style-name="T88">：</text:span><text:span text:style-name="T155">(A+B)*C</text:span></text:p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Standard" loext:marker-style-name="T116"><text:span text:style-name="T117">讀入</text:span><text:span text:style-name="T116"/></text:p>
          </table:table-cell>
          <table:table-cell table:style-name="表格21.A1" office:value-type="string">
            <text:p text:style-name="Standard" loext:marker-style-name="T116"><text:span text:style-name="T117">輸出</text:span><text:span text:style-name="T116"/></text:p>
          </table:table-cell>
          <table:table-cell table:style-name="表格21.A1" office:value-type="string">
            <text:p text:style-name="Standard" loext:marker-style-name="T116"><text:span text:style-name="T118">Stack</text:span><text:span text:style-name="T116"/></text:p>
          </table:table-cell>
        </table:table-row>
        <table:table-row table:style-name="表格21.1">
          <table:table-cell table:style-name="表格21.A2" office:value-type="string">
            <text:p text:style-name="Standard" loext:marker-style-name="T156"><text:span text:style-name="T156">(</text:span><text:span text:style-name="T156"/></text:p>
          </table:table-cell>
          <table:table-cell table:style-name="表格21.A2" office:value-type="string">
            <text:p text:style-name="Standard" loext:marker-style-name="T156"><text:span text:style-name="T156">（空）</text:span><text:span text:style-name="T156"/></text:p>
          </table:table-cell>
          <table:table-cell table:style-name="表格21.A2" office:value-type="string">
            <text:p text:style-name="Standard" loext:marker-style-name="T156"><text:span text:style-name="T156">(</text:span><text:span text:style-name="T156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156"><text:span text:style-name="T156">A</text:span><text:span text:style-name="T156"/></text:p>
          </table:table-cell>
          <table:table-cell table:style-name="表格21.A3" office:value-type="string">
            <text:p text:style-name="Standard" loext:marker-style-name="T156"><text:span text:style-name="T156">A</text:span><text:span text:style-name="T156"/></text:p>
          </table:table-cell>
          <table:table-cell table:style-name="表格21.A3" office:value-type="string">
            <text:p text:style-name="Standard" loext:marker-style-name="T156"><text:span text:style-name="T156">(</text:span><text:span text:style-name="T156"/></text:p>
          </table:table-cell>
        </table:table-row>
        <text:soft-page-break/>
        <table:table-row table:style-name="表格21.1">
          <table:table-cell table:style-name="表格21.A2" office:value-type="string">
            <text:p text:style-name="Standard" loext:marker-style-name="T156"><text:span text:style-name="T156">+</text:span><text:span text:style-name="T156"/></text:p>
          </table:table-cell>
          <table:table-cell table:style-name="表格21.A2" office:value-type="string">
            <text:p text:style-name="Standard" loext:marker-style-name="T156"><text:span text:style-name="T156">A</text:span><text:span text:style-name="T156"/></text:p>
          </table:table-cell>
          <table:table-cell table:style-name="表格21.A2" office:value-type="string">
            <text:p text:style-name="Standard" loext:marker-style-name="T157"><text:span text:style-name="T157">( +</text:span><text:span text:style-name="T157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156"><text:span text:style-name="T156">B</text:span><text:span text:style-name="T156"/></text:p>
          </table:table-cell>
          <table:table-cell table:style-name="表格21.A3" office:value-type="string">
            <text:p text:style-name="Standard" loext:marker-style-name="T156"><text:span text:style-name="T156">AB</text:span><text:span text:style-name="T156"/></text:p>
          </table:table-cell>
          <table:table-cell table:style-name="表格21.A3" office:value-type="string">
            <text:p text:style-name="Standard" loext:marker-style-name="T156"><text:span text:style-name="T156">( +</text:span><text:span text:style-name="T156"/></text:p>
          </table:table-cell>
        </table:table-row>
        <table:table-row table:style-name="表格21.1">
          <table:table-cell table:style-name="表格21.A2" office:value-type="string">
            <text:p text:style-name="Standard" loext:marker-style-name="T156"><text:span text:style-name="T156">)</text:span><text:span text:style-name="T156"/></text:p>
          </table:table-cell>
          <table:table-cell table:style-name="表格21.A2" office:value-type="string">
            <text:p text:style-name="Standard" loext:marker-style-name="T156"><text:span text:style-name="T156">AB</text:span><text:span text:style-name="T163">+</text:span></text:p>
          </table:table-cell>
          <table:table-cell table:style-name="表格21.A2" office:value-type="string">
            <text:p text:style-name="Standard" loext:marker-style-name="T158"><text:span text:style-name="T158">（空） <text:s/>← Pop 到 ( 為止</text:span><text:span text:style-name="T158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156"><text:span text:style-name="T156">*</text:span><text:span text:style-name="T156"/></text:p>
          </table:table-cell>
          <table:table-cell table:style-name="表格21.A3" office:value-type="string">
            <text:p text:style-name="Standard" loext:marker-style-name="T156"><text:span text:style-name="T156">AB</text:span><text:span text:style-name="T163">+</text:span></text:p>
          </table:table-cell>
          <table:table-cell table:style-name="表格21.A3" office:value-type="string">
            <text:p text:style-name="Standard" loext:marker-style-name="T156"><text:span text:style-name="T156">*</text:span><text:span text:style-name="T156"/></text:p>
          </table:table-cell>
        </table:table-row>
        <table:table-row table:style-name="表格21.1">
          <table:table-cell table:style-name="表格21.A2" office:value-type="string">
            <text:p text:style-name="Standard" loext:marker-style-name="T156"><text:span text:style-name="T156">C</text:span><text:span text:style-name="T156"/></text:p>
          </table:table-cell>
          <table:table-cell table:style-name="表格21.A2" office:value-type="string">
            <text:p text:style-name="Standard" loext:marker-style-name="T156"><text:span text:style-name="T156">AB+C</text:span><text:span text:style-name="T156"/></text:p>
          </table:table-cell>
          <table:table-cell table:style-name="表格21.A2" office:value-type="string">
            <text:p text:style-name="Standard" loext:marker-style-name="T156"><text:span text:style-name="T156">*</text:span><text:span text:style-name="T156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156"><text:span text:style-name="T156">結束</text:span><text:span text:style-name="T156"/></text:p>
          </table:table-cell>
          <table:table-cell table:style-name="表格21.A3" office:value-type="string">
            <text:p text:style-name="Standard" loext:marker-style-name="T156"><text:span text:style-name="T156">AB+C*</text:span><text:span text:style-name="T156"/></text:p>
          </table:table-cell>
          <table:table-cell table:style-name="表格21.A3" office:value-type="string">
            <text:p text:style-name="Standard" loext:marker-style-name="T156"><text:span text:style-name="T156">（Pop *）</text:span><text:span text:style-name="T156"/></text:p>
          </table:table-cell>
        </table:table-row>
        <table:table-row table:style-name="表格21.1">
          <table:table-cell table:style-name="表格21.A10" table:number-columns-spanned="3" office:value-type="string">
            <text:p text:style-name="P10" loext:marker-style-name="T161"><text:span text:style-name="T161">★ 答案：AB+C*</text:span><text:span text:style-name="T161"/></text:p>
          </table:table-cell>
          <table:covered-table-cell/>
          <table:covered-table-cell/>
        </table:table-row>
      </table:table>
      <text:p text:style-name="P17"/>
      <text:p text:style-name="P23" loext:marker-style-name="T86"><text:span text:style-name="T88">題目 </text:span><text:span text:style-name="T87">3</text:span><text:span text:style-name="T88">：</text:span><text:span text:style-name="T155">A+B*C-D</text:span></text:p>
      <table:table table:name="表格22" table:style-name="表格22">
        <table:table-column table:style-name="表格22.A"/>
        <table:table-column table:style-name="表格22.B"/>
        <table:table-column table:style-name="表格22.C"/>
        <table:table-row table:style-name="表格22.1">
          <table:table-cell table:style-name="表格22.A1" office:value-type="string">
            <text:p text:style-name="Standard" loext:marker-style-name="T116"><text:span text:style-name="T117">讀入</text:span><text:span text:style-name="T116"/></text:p>
          </table:table-cell>
          <table:table-cell table:style-name="表格22.A1" office:value-type="string">
            <text:p text:style-name="Standard" loext:marker-style-name="T116"><text:span text:style-name="T117">輸出</text:span><text:span text:style-name="T116"/></text:p>
          </table:table-cell>
          <table:table-cell table:style-name="表格22.A1" office:value-type="string">
            <text:p text:style-name="Standard" loext:marker-style-name="T116"><text:span text:style-name="T118">Stack</text:span><text:span text:style-name="T116"/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156"><text:span text:style-name="T156">A</text:span><text:span text:style-name="T156"/></text:p>
          </table:table-cell>
          <table:table-cell table:style-name="表格22.A2" office:value-type="string">
            <text:p text:style-name="Standard" loext:marker-style-name="T156"><text:span text:style-name="T156">A</text:span><text:span text:style-name="T156"/></text:p>
          </table:table-cell>
          <table:table-cell table:style-name="表格22.A2" office:value-type="string">
            <text:p text:style-name="Standard" loext:marker-style-name="T156"><text:span text:style-name="T156">（空）</text:span><text:span text:style-name="T156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156"><text:span text:style-name="T156">+</text:span><text:span text:style-name="T156"/></text:p>
          </table:table-cell>
          <table:table-cell table:style-name="表格22.A3" office:value-type="string">
            <text:p text:style-name="Standard" loext:marker-style-name="T156"><text:span text:style-name="T156">A</text:span><text:span text:style-name="T156"/></text:p>
          </table:table-cell>
          <table:table-cell table:style-name="表格22.A3" office:value-type="string">
            <text:p text:style-name="Standard" loext:marker-style-name="T156"><text:span text:style-name="T156">+</text:span><text:span text:style-name="T156"/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156"><text:span text:style-name="T156">B</text:span><text:span text:style-name="T156"/></text:p>
          </table:table-cell>
          <table:table-cell table:style-name="表格22.A2" office:value-type="string">
            <text:p text:style-name="Standard" loext:marker-style-name="T156"><text:span text:style-name="T156">AB</text:span><text:span text:style-name="T156"/></text:p>
          </table:table-cell>
          <table:table-cell table:style-name="表格22.A2" office:value-type="string">
            <text:p text:style-name="Standard" loext:marker-style-name="T156"><text:span text:style-name="T156">+</text:span><text:span text:style-name="T156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156"><text:span text:style-name="T156">*</text:span><text:span text:style-name="T156"/></text:p>
          </table:table-cell>
          <table:table-cell table:style-name="表格22.A3" office:value-type="string">
            <text:p text:style-name="Standard" loext:marker-style-name="T156"><text:span text:style-name="T156">AB</text:span><text:span text:style-name="T156"/></text:p>
          </table:table-cell>
          <table:table-cell table:style-name="表格22.A3" office:value-type="string">
            <text:p text:style-name="Standard" loext:marker-style-name="T156"><text:span text:style-name="T157">+ * </text:span><text:span text:style-name="T156"><text:s/>（</text:span><text:span text:style-name="T158">* &gt; +，直接放</text:span><text:span text:style-name="T156">）</text:span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156"><text:span text:style-name="T156">C</text:span><text:span text:style-name="T156"/></text:p>
          </table:table-cell>
          <table:table-cell table:style-name="表格22.A2" office:value-type="string">
            <text:p text:style-name="Standard" loext:marker-style-name="T156"><text:span text:style-name="T156">ABC</text:span><text:span text:style-name="T156"/></text:p>
          </table:table-cell>
          <table:table-cell table:style-name="表格22.A2" office:value-type="string">
            <text:p text:style-name="Standard" loext:marker-style-name="T157"><text:span text:style-name="T157">+ *</text:span><text:span text:style-name="T157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156"><text:span text:style-name="T156">-</text:span><text:span text:style-name="T156"/></text:p>
          </table:table-cell>
          <table:table-cell table:style-name="表格22.A3" office:value-type="string">
            <text:p text:style-name="Standard" loext:marker-style-name="T156"><text:span text:style-name="T156">ABC*+</text:span><text:span text:style-name="T156"/></text:p>
          </table:table-cell>
          <table:table-cell table:style-name="表格22.A3" office:value-type="string">
            <text:p text:style-name="Standard" loext:marker-style-name="T156"><text:span text:style-name="T156">- <text:s/>（</text:span><text:span text:style-name="T164">- ≤ *，先 Pop *</text:span><text:span text:style-name="T156">；</text:span><text:span text:style-name="T165">- ≤ +，再 Pop +</text:span><text:span text:style-name="T156">；</text:span><text:span text:style-name="T166">最後 Push -</text:span><text:span text:style-name="T156">）(</text:span><text:span text:style-name="T159">當看到新的運算子時：如果 Stack 裡面的運算子比它更早算就：先拿出來輸出</text:span><text:span text:style-name="T156">)</text:span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156"><text:span text:style-name="T156">D</text:span><text:span text:style-name="T156"/></text:p>
          </table:table-cell>
          <table:table-cell table:style-name="表格22.A2" office:value-type="string">
            <text:p text:style-name="Standard" loext:marker-style-name="T156"><text:span text:style-name="T156">ABC*+D</text:span><text:span text:style-name="T156"/></text:p>
          </table:table-cell>
          <table:table-cell table:style-name="表格22.A2" office:value-type="string">
            <text:p text:style-name="Standard" loext:marker-style-name="T156"><text:span text:style-name="T156">-</text:span><text:span text:style-name="T156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156"><text:span text:style-name="T156">結束</text:span><text:span text:style-name="T156"/></text:p>
          </table:table-cell>
          <table:table-cell table:style-name="表格22.A3" office:value-type="string">
            <text:p text:style-name="Standard" loext:marker-style-name="T156"><text:span text:style-name="T156">ABC*+D-</text:span><text:span text:style-name="T156"/></text:p>
          </table:table-cell>
          <table:table-cell table:style-name="表格22.A3" office:value-type="string">
            <text:p text:style-name="Standard" loext:marker-style-name="T156"><text:span text:style-name="T156">（Pop -）</text:span><text:span text:style-name="T156"/></text:p>
          </table:table-cell>
        </table:table-row>
        <table:table-row table:style-name="表格22.1">
          <table:table-cell table:style-name="表格22.A10" table:number-columns-spanned="3" office:value-type="string">
            <text:p text:style-name="P10" loext:marker-style-name="T161"><text:span text:style-name="T161">★ 答案：ABC*+D-</text:span><text:span text:style-name="T161"/></text:p>
          </table:table-cell>
          <table:covered-table-cell/>
          <table:covered-table-cell/>
        </table:table-row>
      </table:table>
      <text:p text:style-name="P17"/>
      <text:p text:style-name="P23" loext:marker-style-name="T86"><text:span text:style-name="T88">題目 </text:span><text:span text:style-name="T87">4</text:span><text:span text:style-name="T88">：</text:span><text:span text:style-name="T155">(A+B)*(C-D)</text:span></text:p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Standard" loext:marker-style-name="T116"><text:span text:style-name="T117">讀入</text:span><text:span text:style-name="T116"/></text:p>
          </table:table-cell>
          <table:table-cell table:style-name="表格23.A1" office:value-type="string">
            <text:p text:style-name="Standard" loext:marker-style-name="T116"><text:span text:style-name="T117">輸出</text:span><text:span text:style-name="T116"/></text:p>
          </table:table-cell>
          <table:table-cell table:style-name="表格23.A1" office:value-type="string">
            <text:p text:style-name="Standard" loext:marker-style-name="T116"><text:span text:style-name="T118">Stack</text:span><text:span text:style-name="T116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156"><text:span text:style-name="T156">(</text:span><text:span text:style-name="T156"/></text:p>
          </table:table-cell>
          <table:table-cell table:style-name="表格23.A2" office:value-type="string">
            <text:p text:style-name="Standard" loext:marker-style-name="T156"><text:span text:style-name="T156">（空）</text:span><text:span text:style-name="T156"/></text:p>
          </table:table-cell>
          <table:table-cell table:style-name="表格23.A2" office:value-type="string">
            <text:p text:style-name="Standard" loext:marker-style-name="T156"><text:span text:style-name="T156">(</text:span><text:span text:style-name="T156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156"><text:span text:style-name="T156">A</text:span><text:span text:style-name="T156"/></text:p>
          </table:table-cell>
          <table:table-cell table:style-name="表格23.A3" office:value-type="string">
            <text:p text:style-name="Standard" loext:marker-style-name="T156"><text:span text:style-name="T156">A</text:span><text:span text:style-name="T156"/></text:p>
          </table:table-cell>
          <table:table-cell table:style-name="表格23.A3" office:value-type="string">
            <text:p text:style-name="Standard" loext:marker-style-name="T156"><text:span text:style-name="T156">(</text:span><text:span text:style-name="T156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156"><text:span text:style-name="T156">+</text:span><text:span text:style-name="T156"/></text:p>
          </table:table-cell>
          <table:table-cell table:style-name="表格23.A2" office:value-type="string">
            <text:p text:style-name="Standard" loext:marker-style-name="T156"><text:span text:style-name="T156">A</text:span><text:span text:style-name="T156"/></text:p>
          </table:table-cell>
          <table:table-cell table:style-name="表格23.A2" office:value-type="string">
            <text:p text:style-name="Standard" loext:marker-style-name="T156"><text:span text:style-name="T156">( +</text:span><text:span text:style-name="T156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156"><text:span text:style-name="T156">B</text:span><text:span text:style-name="T156"/></text:p>
          </table:table-cell>
          <table:table-cell table:style-name="表格23.A3" office:value-type="string">
            <text:p text:style-name="Standard" loext:marker-style-name="T156"><text:span text:style-name="T156">AB</text:span><text:span text:style-name="T156"/></text:p>
          </table:table-cell>
          <table:table-cell table:style-name="表格23.A3" office:value-type="string">
            <text:p text:style-name="Standard" loext:marker-style-name="T156"><text:span text:style-name="T156">( +</text:span><text:span text:style-name="T156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156"><text:span text:style-name="T156">)</text:span><text:span text:style-name="T156"/></text:p>
          </table:table-cell>
          <table:table-cell table:style-name="表格23.A2" office:value-type="string">
            <text:p text:style-name="Standard" loext:marker-style-name="T156"><text:span text:style-name="T156">AB+</text:span><text:span text:style-name="T156"/></text:p>
          </table:table-cell>
          <table:table-cell table:style-name="表格23.A2" office:value-type="string">
            <text:p text:style-name="Standard" loext:marker-style-name="T156"><text:span text:style-name="T156">（空）</text:span><text:span text:style-name="T156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156"><text:span text:style-name="T156">*</text:span><text:span text:style-name="T156"/></text:p>
          </table:table-cell>
          <table:table-cell table:style-name="表格23.A3" office:value-type="string">
            <text:p text:style-name="Standard" loext:marker-style-name="T156"><text:span text:style-name="T156">AB+</text:span><text:span text:style-name="T156"/></text:p>
          </table:table-cell>
          <table:table-cell table:style-name="表格23.A3" office:value-type="string">
            <text:p text:style-name="Standard" loext:marker-style-name="T156"><text:span text:style-name="T156">*</text:span><text:span text:style-name="T156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156"><text:span text:style-name="T156">(</text:span><text:span text:style-name="T156"/></text:p>
          </table:table-cell>
          <table:table-cell table:style-name="表格23.A2" office:value-type="string">
            <text:p text:style-name="Standard" loext:marker-style-name="T156"><text:span text:style-name="T156">AB+</text:span><text:span text:style-name="T156"/></text:p>
          </table:table-cell>
          <table:table-cell table:style-name="表格23.A2" office:value-type="string">
            <text:p text:style-name="Standard" loext:marker-style-name="T156"><text:span text:style-name="T156">* (</text:span><text:span text:style-name="T156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156"><text:span text:style-name="T156">C</text:span><text:span text:style-name="T156"/></text:p>
          </table:table-cell>
          <table:table-cell table:style-name="表格23.A3" office:value-type="string">
            <text:p text:style-name="Standard" loext:marker-style-name="T156"><text:span text:style-name="T156">AB+C</text:span><text:span text:style-name="T156"/></text:p>
          </table:table-cell>
          <table:table-cell table:style-name="表格23.A3" office:value-type="string">
            <text:p text:style-name="Standard" loext:marker-style-name="T156"><text:span text:style-name="T156">* (</text:span><text:span text:style-name="T156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156"><text:span text:style-name="T156">-</text:span><text:span text:style-name="T156"/></text:p>
          </table:table-cell>
          <table:table-cell table:style-name="表格23.A2" office:value-type="string">
            <text:p text:style-name="Standard" loext:marker-style-name="T156"><text:span text:style-name="T156">AB+C</text:span><text:span text:style-name="T156"/></text:p>
          </table:table-cell>
          <table:table-cell table:style-name="表格23.A2" office:value-type="string">
            <text:p text:style-name="Standard" loext:marker-style-name="T156"><text:span text:style-name="T156">* ( - <text:s/></text:span><text:span text:style-name="T167">注意此處：Stack 頂端根本不是 *</text:span><text:span text:style-name="T168">(不然我還以為依照規則4，當看到新的運算子時，如果 Stack 裡面的運算子比它更早算就先拿Stack 裡面的運算子來輸出)</text:span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156"><text:span text:style-name="T156">D</text:span><text:span text:style-name="T156"/></text:p>
          </table:table-cell>
          <table:table-cell table:style-name="表格23.A3" office:value-type="string">
            <text:p text:style-name="Standard" loext:marker-style-name="T156"><text:span text:style-name="T156">AB+CD</text:span><text:span text:style-name="T156"/></text:p>
          </table:table-cell>
          <table:table-cell table:style-name="表格23.A3" office:value-type="string">
            <text:p text:style-name="Standard" loext:marker-style-name="T156"><text:span text:style-name="T156">* ( -</text:span><text:span text:style-name="T156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156"><text:span text:style-name="T156">)</text:span><text:span text:style-name="T156"/></text:p>
          </table:table-cell>
          <table:table-cell table:style-name="表格23.A2" office:value-type="string">
            <text:p text:style-name="Standard" loext:marker-style-name="T156"><text:span text:style-name="T156">AB+CD-</text:span><text:span text:style-name="T156"/></text:p>
          </table:table-cell>
          <table:table-cell table:style-name="表格23.A2" office:value-type="string">
            <text:p text:style-name="Standard" loext:marker-style-name="T156"><text:span text:style-name="T163">* </text:span><text:span text:style-name="T156"><text:s text:c="2"/>← </text:span><text:span text:style-name="T169">Pop 到 (</text:span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156"><text:span text:style-name="T156">結束</text:span><text:span text:style-name="T156"/></text:p>
          </table:table-cell>
          <table:table-cell table:style-name="表格23.A3" office:value-type="string">
            <text:p text:style-name="Standard" loext:marker-style-name="T156"><text:span text:style-name="T156">AB+CD-*</text:span><text:span text:style-name="T156"/></text:p>
          </table:table-cell>
          <table:table-cell table:style-name="表格23.A3" office:value-type="string">
            <text:p text:style-name="Standard" loext:marker-style-name="T156"><text:span text:style-name="T156">（Pop *）</text:span><text:span text:style-name="T156"/></text:p>
          </table:table-cell>
        </table:table-row>
        <text:soft-page-break/>
        <table:table-row table:style-name="表格23.1">
          <table:table-cell table:style-name="表格23.A14" table:number-columns-spanned="3" office:value-type="string">
            <text:p text:style-name="P10" loext:marker-style-name="T161"><text:span text:style-name="T161">★ 答案：AB+CD-*</text:span><text:span text:style-name="T161"/></text:p>
          </table:table-cell>
          <table:covered-table-cell/>
          <table:covered-table-cell/>
        </table:table-row>
      </table:table>
      <text:p text:style-name="P17"/>
      <text:p text:style-name="P23" loext:marker-style-name="T86"><text:span text:style-name="T88">題目 </text:span><text:span text:style-name="T87">5</text:span><text:span text:style-name="T88">：</text:span><text:span text:style-name="T155">A+B*(C-D)/E</text:span>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row table:style-name="表格24.1">
          <table:table-cell table:style-name="表格24.A1" office:value-type="string">
            <text:p text:style-name="Standard" loext:marker-style-name="T116"><text:span text:style-name="T117">讀入</text:span><text:span text:style-name="T116"/></text:p>
          </table:table-cell>
          <table:table-cell table:style-name="表格24.A1" office:value-type="string">
            <text:p text:style-name="Standard" loext:marker-style-name="T116"><text:span text:style-name="T117">輸出</text:span><text:span text:style-name="T116"/></text:p>
          </table:table-cell>
          <table:table-cell table:style-name="表格24.A1" office:value-type="string">
            <text:p text:style-name="Standard" loext:marker-style-name="T116"><text:span text:style-name="T118">Stack</text:span><text:span text:style-name="T116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156"><text:span text:style-name="T156">A</text:span><text:span text:style-name="T156"/></text:p>
          </table:table-cell>
          <table:table-cell table:style-name="表格24.A2" office:value-type="string">
            <text:p text:style-name="Standard" loext:marker-style-name="T156"><text:span text:style-name="T156">A</text:span><text:span text:style-name="T156"/></text:p>
          </table:table-cell>
          <table:table-cell table:style-name="表格24.A2" office:value-type="string">
            <text:p text:style-name="Standard" loext:marker-style-name="T156"><text:span text:style-name="T156">（空）</text:span><text:span text:style-name="T156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156"><text:span text:style-name="T156">+</text:span><text:span text:style-name="T156"/></text:p>
          </table:table-cell>
          <table:table-cell table:style-name="表格24.A3" office:value-type="string">
            <text:p text:style-name="Standard" loext:marker-style-name="T156"><text:span text:style-name="T156">A</text:span><text:span text:style-name="T156"/></text:p>
          </table:table-cell>
          <table:table-cell table:style-name="表格24.A3" office:value-type="string">
            <text:p text:style-name="Standard" loext:marker-style-name="T156"><text:span text:style-name="T156">+</text:span><text:span text:style-name="T156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156"><text:span text:style-name="T156">B</text:span><text:span text:style-name="T156"/></text:p>
          </table:table-cell>
          <table:table-cell table:style-name="表格24.A2" office:value-type="string">
            <text:p text:style-name="Standard" loext:marker-style-name="T156"><text:span text:style-name="T156">AB</text:span><text:span text:style-name="T156"/></text:p>
          </table:table-cell>
          <table:table-cell table:style-name="表格24.A2" office:value-type="string">
            <text:p text:style-name="Standard" loext:marker-style-name="T156"><text:span text:style-name="T156">+</text:span><text:span text:style-name="T156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156"><text:span text:style-name="T156">*</text:span><text:span text:style-name="T156"/></text:p>
          </table:table-cell>
          <table:table-cell table:style-name="表格24.A3" office:value-type="string">
            <text:p text:style-name="Standard" loext:marker-style-name="T156"><text:span text:style-name="T156">AB</text:span><text:span text:style-name="T156"/></text:p>
          </table:table-cell>
          <table:table-cell table:style-name="表格24.A3" office:value-type="string">
            <text:p text:style-name="Standard" loext:marker-style-name="T156"><text:span text:style-name="T156">+ * <text:s/>（</text:span><text:span text:style-name="T158">* &gt; +，直接放</text:span><text:span text:style-name="T156">）</text:span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156"><text:span text:style-name="T156">(</text:span><text:span text:style-name="T156"/></text:p>
          </table:table-cell>
          <table:table-cell table:style-name="表格24.A2" office:value-type="string">
            <text:p text:style-name="Standard" loext:marker-style-name="T156"><text:span text:style-name="T156">AB</text:span><text:span text:style-name="T156"/></text:p>
          </table:table-cell>
          <table:table-cell table:style-name="表格24.A2" office:value-type="string">
            <text:p text:style-name="Standard" loext:marker-style-name="T156"><text:span text:style-name="T156">+ * (</text:span><text:span text:style-name="T156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156"><text:span text:style-name="T156">C</text:span><text:span text:style-name="T156"/></text:p>
          </table:table-cell>
          <table:table-cell table:style-name="表格24.A3" office:value-type="string">
            <text:p text:style-name="Standard" loext:marker-style-name="T156"><text:span text:style-name="T156">ABC</text:span><text:span text:style-name="T156"/></text:p>
          </table:table-cell>
          <table:table-cell table:style-name="表格24.A3" office:value-type="string">
            <text:p text:style-name="Standard" loext:marker-style-name="T156"><text:span text:style-name="T156">+ * (</text:span><text:span text:style-name="T156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156"><text:span text:style-name="T156">-</text:span><text:span text:style-name="T156"/></text:p>
          </table:table-cell>
          <table:table-cell table:style-name="表格24.A2" office:value-type="string">
            <text:p text:style-name="Standard" loext:marker-style-name="T156"><text:span text:style-name="T156">ABC</text:span><text:span text:style-name="T156"/></text:p>
          </table:table-cell>
          <table:table-cell table:style-name="表格24.A2" office:value-type="string">
            <text:p text:style-name="Standard" loext:marker-style-name="T156"><text:span text:style-name="T156">+ * ( -</text:span><text:span text:style-name="T156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156"><text:span text:style-name="T156">D</text:span><text:span text:style-name="T156"/></text:p>
          </table:table-cell>
          <table:table-cell table:style-name="表格24.A3" office:value-type="string">
            <text:p text:style-name="Standard" loext:marker-style-name="T156"><text:span text:style-name="T156">ABCD</text:span><text:span text:style-name="T156"/></text:p>
          </table:table-cell>
          <table:table-cell table:style-name="表格24.A3" office:value-type="string">
            <text:p text:style-name="Standard" loext:marker-style-name="T156"><text:span text:style-name="T156">+ * ( -</text:span><text:span text:style-name="T156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156"><text:span text:style-name="T156">)</text:span><text:span text:style-name="T156"/></text:p>
          </table:table-cell>
          <table:table-cell table:style-name="表格24.A2" office:value-type="string">
            <text:p text:style-name="Standard" loext:marker-style-name="T156"><text:span text:style-name="T156">ABCD-</text:span><text:span text:style-name="T156"/></text:p>
          </table:table-cell>
          <table:table-cell table:style-name="表格24.A2" office:value-type="string">
            <text:p text:style-name="Standard" loext:marker-style-name="T156"><text:span text:style-name="T156">+ * <text:s text:c="2"/>←</text:span><text:span text:style-name="T169"> Pop 到 (</text:span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156"><text:span text:style-name="T156">/</text:span><text:span text:style-name="T156"/></text:p>
          </table:table-cell>
          <table:table-cell table:style-name="表格24.A3" office:value-type="string">
            <text:p text:style-name="Standard" loext:marker-style-name="T156"><text:span text:style-name="T156">ABCD-*</text:span><text:span text:style-name="T156"/></text:p>
          </table:table-cell>
          <table:table-cell table:style-name="表格24.A3" office:value-type="string">
            <text:p text:style-name="Standard" loext:marker-style-name="T156"><text:span text:style-name="T156">讀到 / </text:span><text:span text:style-name="T157">此時 Stack頂端是 *</text:span><text:span text:style-name="T156"><text:line-break/><text:line-break/></text:span><text:span text:style-name="T170">/ 與 * 同優先權 → 先 Pop *</text:span><text:span text:style-name="T156"><text:line-break/><text:line-break/></text:span><text:span text:style-name="T171">此時新的 Stack頂端變成 +</text:span><text:span text:style-name="T156"><text:line-break/><text:line-break/></text:span><text:span text:style-name="T159">/ 的優先權高於 + → Push /</text:span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156"><text:span text:style-name="T156">E</text:span><text:span text:style-name="T156"/></text:p>
          </table:table-cell>
          <table:table-cell table:style-name="表格24.A2" office:value-type="string">
            <text:p text:style-name="Standard" loext:marker-style-name="T156"><text:span text:style-name="T156">ABCD-*E</text:span><text:span text:style-name="T156"/></text:p>
          </table:table-cell>
          <table:table-cell table:style-name="表格24.A2" office:value-type="string">
            <text:p text:style-name="Standard" loext:marker-style-name="T156"><text:span text:style-name="T156">+ /</text:span><text:span text:style-name="T156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156"><text:span text:style-name="T156">結束</text:span><text:span text:style-name="T156"/></text:p>
          </table:table-cell>
          <table:table-cell table:style-name="表格24.A3" office:value-type="string">
            <text:p text:style-name="Standard" loext:marker-style-name="T156"><text:span text:style-name="T156">ABCD-*E/+</text:span><text:span text:style-name="T156"/></text:p>
          </table:table-cell>
          <table:table-cell table:style-name="表格24.A3" office:value-type="string">
            <text:p text:style-name="Standard" loext:marker-style-name="T156"><text:span text:style-name="T156">（Pop /，再 Pop +）</text:span><text:span text:style-name="T156"/></text:p>
          </table:table-cell>
        </table:table-row>
        <table:table-row table:style-name="表格24.1">
          <table:table-cell table:style-name="表格24.A14" table:number-columns-spanned="3" office:value-type="string">
            <text:p text:style-name="P10" loext:marker-style-name="T161"><text:span text:style-name="T161">★ 答案：ABCD-*E/+</text:span><text:span text:style-name="T161"/></text:p>
          </table:table-cell>
          <table:covered-table-cell/>
          <table:covered-table-cell/>
        </table:table-row>
      </table:table>
      <text:p text:style-name="P22"/>
      <text:h text:style-name="P6" text:outline-level="2" loext:marker-style-name="T9"><text:span text:style-name="T10">常見陷阱：</text:span><text:span text:style-name="T172">同優先權的左結合</text:span>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15" loext:marker-style-name="T26"><text:span text:style-name="T26">題目：A-B+C</text:span><text:span text:style-name="T26"/></text:p>
            <text:p text:style-name="P31" loext:marker-style-name="T61"><text:span text:style-name="T61">❌ 錯誤答案：ABC+-</text:span><text:span text:style-name="T61"/></text:p>
            <text:p text:style-name="P29" loext:marker-style-name="T62"><text:span text:style-name="T62">✅ </text:span><text:span text:style-name="T173">正確答案：AB-C+</text:span></text:p>
            <text:p text:style-name="P19" loext:marker-style-name="T11"><text:span text:style-name="T12">原因：</text:span><text:span text:style-name="T15">+ </text:span><text:span text:style-name="T12">和 </text:span><text:span text:style-name="T15">- </text:span><text:span text:style-name="T12">優先權相同，採左結合，計算順序為 </text:span><text:span text:style-name="T15">(A-B)+C</text:span><text:span text:style-name="T12">。 </text:span><text:span text:style-name="T18">遇到 </text:span><text:span text:style-name="T19">+ </text:span><text:span text:style-name="T18">時，</text:span><text:span text:style-name="T19">Stack </text:span><text:span text:style-name="T18">頂端是 </text:span><text:span text:style-name="T19">-</text:span><text:span text:style-name="T18">，兩者優先權相同</text:span><text:span text:style-name="T12">，</text:span><text:span text:style-name="T149">必須先 </text:span><text:span text:style-name="T150">Pop -</text:span><text:span text:style-name="T149">，再 </text:span><text:span text:style-name="T150">Push +</text:span><text:span text:style-name="T12">。</text:span></text:p>
          </table:table-cell>
        </table:table-row>
      </table:table>
      <text:p text:style-name="Standard"/>
      <text:h text:style-name="P16" text:outline-level="1" loext:marker-style-name="T7"><text:span text:style-name="T8">第七部分：</text:span><text:span text:style-name="T93">Prefix </text:span><text:span text:style-name="T94">求值</text:span><text:span text:style-name="T8"> 與</text:span><text:span text:style-name="T174"> </text:span><text:span text:style-name="T175">Postfix ↔ Tree </text:span><text:span text:style-name="T174">互轉</text:span></text:h>
      <text:p text:style-name="P5"/>
      <text:h text:style-name="P6" text:outline-level="2" loext:marker-style-name="T9"><text:span text:style-name="T9">Prefix Stack </text:span><text:span text:style-name="T10">求值</text:span></text:h>
      <text:p text:style-name="P7" loext:marker-style-name="T11"><text:span text:style-name="T176">Prefix</text:span><text:span text:style-name="T177">（前置式）與 </text:span><text:span text:style-name="T176">Postfix </text:span><text:span text:style-name="T177">的差別在於讀取方向</text:span><text:span text:style-name="T12">：</text:span><text:span text:style-name="T178">Postfix </text:span><text:span text:style-name="T179">從左往右，</text:span><text:span text:style-name="T178">Prefix </text:span><text:span text:style-name="T179">從右往左</text:span><text:span text:style-name="T12">。</text:span></text:p>
      <text:p text:style-name="P8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5" loext:marker-style-name="T98"><text:span text:style-name="T99">Prefix Stack </text:span><text:span text:style-name="T100">計算規則</text:span></text:p>
            <text:p text:style-name="P31" loext:marker-style-name="T11"><text:span text:style-name="T15">① </text:span><text:span text:style-name="T63">從右往左讀取每個符號</text:span></text:p>
            <text:p text:style-name="P27" loext:marker-style-name="T11"><text:span text:style-name="T15">② </text:span><text:span text:style-name="T95">看到 運算元 </text:span><text:span text:style-name="T12">→ </text:span><text:span text:style-name="T103">Push </text:span><text:span text:style-name="T102">進 </text:span><text:span text:style-name="T103">Stack</text:span></text:p>
            <text:p text:style-name="P28" loext:marker-style-name="T11"><text:span text:style-name="T15">③ </text:span><text:span text:style-name="T180">看到 運算子</text:span><text:span text:style-name="T12"> → </text:span><text:span text:style-name="T19">Pop </text:span><text:span text:style-name="T18">兩個值，計算（先 </text:span><text:span text:style-name="T19">Pop </text:span><text:span text:style-name="T18">的是左邊，後 </text:span><text:span text:style-name="T19">Pop </text:span><text:span text:style-name="T18">的是右邊）</text:span><text:span text:style-name="T12">，</text:span><text:span text:style-name="T15">Push </text:span><text:span text:style-name="T12">結果</text:span></text:p>
            <text:p text:style-name="P20" loext:marker-style-name="T181"><text:span text:style-name="T182">⚠️ </text:span><text:span text:style-name="T183">注意：</text:span><text:span text:style-name="T182">Prefix </text:span><text:span text:style-name="T183">的 </text:span><text:span text:style-name="T182">Pop </text:span><text:span text:style-name="T183">順序與 </text:span><text:span text:style-name="T182">Postfix </text:span><text:span text:style-name="T183">相反！</text:span></text:p>
          </table:table-cell>
        </table:table-row>
      </table:table>
      <text:p text:style-name="P17"/>
      <text:p text:style-name="P7" loext:marker-style-name="T26"><text:span text:style-name="T26">範例：+*23 4（代表 (2×3)+4 = 10）</text:span><text:span text:style-name="T26"/></text:p>
      <text:p text:style-name="P33"/>
      <table:table table:name="表格27" table:style-name="表格27">
        <table:table-column table:style-name="表格27.A"/>
        <table:table-column table:style-name="表格27.B"/>
        <table:table-column table:style-name="表格27.C"/>
        <table:table-row table:style-name="表格27.1">
          <table:table-cell table:style-name="表格27.A1" office:value-type="string">
            <text:p text:style-name="Standard" loext:marker-style-name="T116"><text:span text:style-name="T117">符號（從右到左）</text:span><text:span text:style-name="T116"/></text:p>
          </table:table-cell>
          <table:table-cell table:style-name="表格27.A1" office:value-type="string">
            <text:p text:style-name="Standard" loext:marker-style-name="T116"><text:span text:style-name="T117">動作</text:span><text:span text:style-name="T116"/></text:p>
          </table:table-cell>
          <table:table-cell table:style-name="表格27.A1" office:value-type="string">
            <text:p text:style-name="Standard" loext:marker-style-name="T116"><text:span text:style-name="T118">Stack</text:span><text:span text:style-name="T116"/></text:p>
          </table:table-cell>
        </table:table-row>
        <table:table-row table:style-name="表格27.1">
          <table:table-cell table:style-name="表格27.A2" office:value-type="string">
            <text:p text:style-name="Standard" loext:marker-style-name="T119"><text:span text:style-name="T120">4</text:span><text:span text:style-name="T121">（最右）</text:span></text:p>
          </table:table-cell>
          <table:table-cell table:style-name="表格27.A2" office:value-type="string">
            <text:p text:style-name="Standard" loext:marker-style-name="T119"><text:span text:style-name="T120">Push 4</text:span><text:span text:style-name="T119"/></text:p>
          </table:table-cell>
          <table:table-cell table:style-name="表格27.A2" office:value-type="string">
            <text:p text:style-name="Standard" loext:marker-style-name="T119"><text:span text:style-name="T120">[4]</text:span><text:span text:style-name="T119"/></text:p>
          </table:table-cell>
        </table:table-row>
        <table:table-row table:style-name="表格27.1">
          <table:table-cell table:style-name="表格27.A3" office:value-type="string">
            <text:p text:style-name="Standard" loext:marker-style-name="T119"><text:span text:style-name="T120">3</text:span><text:span text:style-name="T119"/></text:p>
          </table:table-cell>
          <table:table-cell table:style-name="表格27.A3" office:value-type="string">
            <text:p text:style-name="Standard" loext:marker-style-name="T119"><text:span text:style-name="T120">Push 3</text:span><text:span text:style-name="T119"/></text:p>
          </table:table-cell>
          <table:table-cell table:style-name="表格27.A3" office:value-type="string">
            <text:p text:style-name="Standard" loext:marker-style-name="T119"><text:span text:style-name="T120">[4, 3]</text:span><text:span text:style-name="T119"/></text:p>
          </table:table-cell>
        </table:table-row>
        <table:table-row table:style-name="表格27.1">
          <table:table-cell table:style-name="表格27.A2" office:value-type="string">
            <text:p text:style-name="Standard" loext:marker-style-name="T119"><text:span text:style-name="T120">2</text:span><text:span text:style-name="T119"/></text:p>
          </table:table-cell>
          <table:table-cell table:style-name="表格27.A2" office:value-type="string">
            <text:p text:style-name="Standard" loext:marker-style-name="T119"><text:span text:style-name="T120">Push 2</text:span><text:span text:style-name="T119"/></text:p>
          </table:table-cell>
          <table:table-cell table:style-name="表格27.A2" office:value-type="string">
            <text:p text:style-name="Standard" loext:marker-style-name="T119"><text:span text:style-name="T120">[4, 3, 2]</text:span><text:span text:style-name="T119"/></text:p>
          </table:table-cell>
        </table:table-row>
        <table:table-row table:style-name="表格27.1">
          <table:table-cell table:style-name="表格27.A3" office:value-type="string">
            <text:p text:style-name="Standard" loext:marker-style-name="T119"><text:span text:style-name="T120">*</text:span><text:span text:style-name="T119"/></text:p>
          </table:table-cell>
          <table:table-cell table:style-name="表格27.A3" office:value-type="string">
            <text:p text:style-name="Standard" loext:marker-style-name="T119"><text:span text:style-name="T184">Pop 2</text:span><text:span text:style-name="T120">, Pop 3</text:span><text:span text:style-name="T121">，計算 </text:span><text:span text:style-name="T184">2</text:span><text:span text:style-name="T120">×3=6</text:span><text:span text:style-name="T121">，</text:span><text:span text:style-name="T120">Push 6</text:span></text:p>
          </table:table-cell>
          <table:table-cell table:style-name="表格27.A3" office:value-type="string">
            <text:p text:style-name="Standard" loext:marker-style-name="T119"><text:span text:style-name="T120">[4, 6]</text:span><text:span text:style-name="T119"/></text:p>
          </table:table-cell>
        </table:table-row>
        <table:table-row table:style-name="表格27.1">
          <table:table-cell table:style-name="表格27.A2" office:value-type="string">
            <text:p text:style-name="Standard" loext:marker-style-name="T119"><text:span text:style-name="T120">+ </text:span><text:span text:style-name="T121">（最左）</text:span></text:p>
          </table:table-cell>
          <table:table-cell table:style-name="表格27.A2" office:value-type="string">
            <text:p text:style-name="Standard" loext:marker-style-name="T119"><text:span text:style-name="T184">Pop 6</text:span><text:span text:style-name="T120">, Pop 4</text:span><text:span text:style-name="T121">，計算 </text:span><text:span text:style-name="T184">6</text:span><text:span text:style-name="T120">+4=10</text:span><text:span text:style-name="T121">，</text:span><text:span text:style-name="T120">Push 10</text:span></text:p>
          </table:table-cell>
          <table:table-cell table:style-name="表格27.A2" office:value-type="string">
            <text:p text:style-name="Standard" loext:marker-style-name="T119"><text:span text:style-name="T120">[10]</text:span><text:span text:style-name="T119"/></text:p>
          </table:table-cell>
        </table:table-row>
        <table:table-row table:style-name="表格27.1">
          <table:table-cell table:style-name="表格27.A7" office:value-type="string">
            <text:p text:style-name="Standard" loext:marker-style-name="T125"><text:span text:style-name="T126">結果</text:span><text:span text:style-name="T125"/></text:p>
          </table:table-cell>
          <table:table-cell table:style-name="表格27.A7" office:value-type="string">
            <text:p text:style-name="Standard"/>
          </table:table-cell>
          <table:table-cell table:style-name="表格27.A7" office:value-type="string">
            <text:p text:style-name="Standard" loext:marker-style-name="T125"><text:span text:style-name="T127">★ </text:span><text:span text:style-name="T126">答案 </text:span><text:span text:style-name="T127">= 10</text:span></text:p>
          </table:table-cell>
        </table:table-row>
      </table:table>
      <text:p text:style-name="P11"/>
      <text:h text:style-name="P6" text:outline-level="2" loext:marker-style-name="T9"><text:span text:style-name="T9">Postfix → Expression Tree</text:span><text:span text:style-name="T9"/></text:h>
      <text:p text:style-name="P34">我們在做什麼？</text:p>
      <text:p text:style-name="P35">Postfix 其實只是一種書寫方式，電腦容易處理。但我們需要知道原始的算式結構。</text:p>
      <text:p text:style-name="P36">例如：<text:span text:style-name="T185">AB+C* 其實代表什麼？</text:span></text:p>
      <text:p text:style-name="P37">答案是：(A+B)*C</text:p>
      <text:p text:style-name="Standard"/>
      <text:p text:style-name="P38">所以這個過程的目的只有一個：<text:span text:style-name="T186">從 AB+C* 恢復出 (A+B)*C</text:span></text:p>
      <text:p text:style-name="Standard"/>
      <text:p text:style-name="P39">⭐ 最重要的觀念</text:p>
      <text:p text:style-name="P40">Stack 裡放的不是字符（A、B、C、+、*），</text:p>
      <text:p text:style-name="P40">而是<text:span text:style-name="T187">逐漸完成的算式</text:span>。</text:p>
      <text:p text:style-name="Standard"/>
      <text:p text:style-name="P35">看這個表格，一切都清楚了：</text:p>
      <text:p text:style-name="Standard"/>
      <text:p text:style-name="P41">讀到 <text:s text:c="3"/>動作 <text:s text:c="25"/>Stack</text:p>
      <text:p text:style-name="P42">A <text:s text:c="5"/>Push A <text:s text:c="23"/>[A]</text:p>
      <text:p text:style-name="P42">B <text:s text:c="5"/>Push B <text:s text:c="23"/>[A][B]</text:p>
      <text:p text:style-name="P43">+ <text:span text:style-name="T188">Pop B、Pop A、組成(A+B)</text:span>、<text:span text:style-name="T189">Push <text:s text:c="2"/>[(A+B)]</text:span></text:p>
      <text:p text:style-name="P42">C <text:s text:c="5"/>Push C <text:s text:c="23"/>[(A+B)][C]</text:p>
      <text:p text:style-name="P43">* <text:span text:style-name="T188">Pop C、Pop(A+B)</text:span>、<text:span text:style-name="T189">組成((A+B)*C)</text:span>、<text:span text:style-name="T190">Push [((A+B)*C)]</text:span></text:p>
      <text:p text:style-name="Standard"/>
      <text:p text:style-name="P44">⚠️ 注意：A、B 不是一直待在 Stack 裡！</text:p>
      <text:p text:style-name="Standard"><text:soft-page-break/></text:p>
      <text:p text:style-name="P35">當看到 + 時：</text:p>
      <text:p text:style-name="P45"><text:s text:c="2"/>✓ Pop B（此時 B 被取出）</text:p>
      <text:p text:style-name="P45"><text:s text:c="2"/>✓ Pop A（此時 A 也被取出，Stack 變空）</text:p>
      <text:p text:style-name="P45"><text:s text:c="2"/>✓ <text:span text:style-name="T191">組成新的「部分算式」：(A+B)</text:span></text:p>
      <text:p text:style-name="P45"><text:s text:c="2"/>✓<text:span text:style-name="T192"> Push (A+B) 回去</text:span>（<text:span text:style-name="T188">現在 Stack 裡只有一個元素：</text:span><text:span text:style-name="T193">(A+B)</text:span>）</text:p>
      <text:p text:style-name="Standard"/>
      <text:p text:style-name="P46">所以 Stack 真正存的是：「已經組好的部分算式」</text:p>
      <text:p text:style-name="Standard"/>
      <text:p text:style-name="P35">(A+B) 其實只是這棵樹的另一種寫法：</text:p>
      <text:p text:style-name="Standard"/>
      <text:p text:style-name="P47"><text:s text:c="2"/>+</text:p>
      <text:p text:style-name="P42"><text:s/>/ \</text:p>
      <text:p text:style-name="P42">A <text:s text:c="2"/>B</text:p>
      <text:p text:style-name="Standard"/>
      <text:p text:style-name="P38">換句話說：Stack 裡存的是「樹」，只是用算式的方式寫出來而已。</text:p>
      <text:p text:style-name="P35">有沒有發現？根本不用提什麼「樹」。</text:p>
      <text:p text:style-name="P38">你只要想成：<text:span text:style-name="T194">Stack 裡存的就是「半完成的算式」</text:span>。</text:p>
      <text:p text:style-name="Standard"/>
      <text:p text:style-name="P34">逐步理解：AB+C*</text:p>
      <text:p text:style-name="Standard"/>
      <text:p text:style-name="P48">讀到 A</text:p>
      <text:p text:style-name="P35">A 就是一個簡單的算式。放進 Stack。</text:p>
      <text:p text:style-name="P42">Stack：[A]</text:p>
      <text:p text:style-name="Standard"/>
      <text:p text:style-name="P48">讀到 B</text:p>
      <text:p text:style-name="P35">B 也是一個簡單的算式。放進 Stack。</text:p>
      <text:p text:style-name="P42">Stack：[A, B]</text:p>
      <text:p text:style-name="Standard"/>
      <text:p text:style-name="P48">讀到 +</text:p>
      <text:p text:style-name="P35"><text:span text:style-name="T188">現在遇到一個運算子</text:span>。<text:span text:style-name="T195">運算子需要多少個東西？</text:span></text:p>
      <text:p text:style-name="P35"><text:span text:style-name="T195">+ 需要兩個</text:span>。所以<text:span text:style-name="T190">從 Stack 拿兩個出來</text:span>。</text:p>
      <text:p text:style-name="Standard"/>
      <text:p text:style-name="P45">第一次 Pop → B（最後進來的先出來）</text:p>
      <text:p text:style-name="P45">第二次 Pop → A</text:p>
      <text:p text:style-name="P49">把它們組合：A + B = (A+B)</text:p>
      <text:p text:style-name="P35"><text:span text:style-name="T196">放回 Stack</text:span>。</text:p>
      <text:p text:style-name="P50">Stack：[A+B]</text:p>
      <text:p text:style-name="Standard"/>
      <text:p text:style-name="P48">讀到 C</text:p>
      <text:p text:style-name="P35">C 也是一個簡單的算式。放進 Stack。</text:p>
      <text:p text:style-name="P42">Stack：[A+B, C]</text:p>
      <text:p text:style-name="Standard"/>
      <text:p text:style-name="P48">讀到 *</text:p>
      <text:p text:style-name="P35">又遇到一個運算子。* 也需要兩個。</text:p>
      <text:p text:style-name="Standard"/>
      <text:p text:style-name="P45">第一次 Pop → C</text:p>
      <text:p text:style-name="P45">第二次 Pop → A+B</text:p>
      <text:p text:style-name="P35">把它們組合：(A+B) * C = (A+B)*C</text:p>
      <text:p text:style-name="P35">放回 Stack。</text:p>
      <text:p text:style-name="P50">Stack：[A+B)*C]</text:p>
      <text:p text:style-name="Standard"/>
      <text:p text:style-name="P51">完成！Stack 裡剩下的就是原始的算式。</text:p>
      <text:p text:style-name="Standard"/>
      <text:p text:style-name="Standard"><text:soft-page-break/><text:span text:style-name="T197">為什麼先 Pop 出來的是「右邊」？</text:span></text:p>
      <text:p text:style-name="P35">因為 Stack 是 LIFO（Last In First Out）。最後進來的先出來。</text:p>
      <text:p text:style-name="Standard"/>
      <text:p text:style-name="P36">例如：AB-</text:p>
      <text:p text:style-name="P35">A 先進來，B 後進來。</text:p>
      <text:p text:style-name="P35">讀到 -，先 Pop 出 B（後進的），再 Pop 出 A（先進的）。</text:p>
      <text:p text:style-name="P52">所以結果是：A - B（✓ 正確）</text:p>
      <text:p text:style-name="P53"/>
      <text:p text:style-name="P54">如果反過來（B - A），就完全錯了。</text:p>
      <text:p text:style-name="Standard"/>
      <text:p text:style-name="P34">從算式到樹（最後一步）</text:p>
      <text:p text:style-name="P35">現在你已經理解了 (A+B)*C 這個算式。</text:p>
      <text:p text:style-name="P35">只需要把它畫成樹就可以了。</text:p>
      <text:p text:style-name="Standard"/>
      <text:p text:style-name="P42">*</text:p>
      <text:p text:style-name="P42">/ \</text:p>
      <text:p text:style-name="P42">+ <text:s text:c="2"/>C</text:p>
      <text:p text:style-name="P42">/ \</text:p>
      <text:p text:style-name="P42">A <text:s text:c="2"/>B</text:p>
      <text:p text:style-name="Standard"/>
      <text:p text:style-name="P35">看？這棵樹就是 (A+B)*C 的視覺表示。</text:p>
      <text:p text:style-name="Standard"/>
      <text:p text:style-name="P34">記住最簡單的方式</text:p>
      <text:p text:style-name="P35">不用一開始就記樹的結構。先掌握：</text:p>
      <text:p text:style-name="Standard"/>
      <text:p text:style-name="P55">✓ <text:span text:style-name="T185">遇到字母 → 放進 Stack</text:span></text:p>
      <text:p text:style-name="P55">✓ <text:span text:style-name="T198">遇到運算子 → Pop 兩個</text:span>，<text:span text:style-name="T199">組合成新的算式</text:span>，<text:span text:style-name="T200">再放回</text:span></text:p>
      <text:p text:style-name="P56">✓ Stack 剩下的就是答案</text:p>
      <text:p text:style-name="Standard"/>
      <text:p text:style-name="P38">等你真的理解了這個過程，再去看「樹」的角度，會自然而然理解的。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5" loext:marker-style-name="T26"><text:span text:style-name="T26">範例：AB+C*</text:span><text:span text:style-name="T26"/></text:p>
            <text:p text:style-name="P31" loext:marker-style-name="T11"><text:span text:style-name="T15">① </text:span><text:span text:style-name="T12">看到 </text:span><text:span text:style-name="T15">A → </text:span><text:span text:style-name="T12">建節點 </text:span><text:span text:style-name="T15">A</text:span><text:span text:style-name="T12">，</text:span><text:span text:style-name="T15">Push</text:span></text:p>
            <text:p text:style-name="P27" loext:marker-style-name="T11"><text:span text:style-name="T15">② </text:span><text:span text:style-name="T12">看到 </text:span><text:span text:style-name="T15">B → </text:span><text:span text:style-name="T12">建節點 </text:span><text:span text:style-name="T15">B</text:span><text:span text:style-name="T12">，</text:span><text:span text:style-name="T15">Push</text:span></text:p>
            <text:p text:style-name="P27" loext:marker-style-name="T11"><text:span text:style-name="T15">③ </text:span><text:span text:style-name="T12">看到 </text:span><text:span text:style-name="T15">+ → Pop B</text:span><text:span text:style-name="T12">（右子樹），</text:span><text:span text:style-name="T15">Pop A</text:span><text:span text:style-name="T12">（左子樹），建 </text:span><text:span text:style-name="T15">+ </text:span><text:span text:style-name="T12">節點，</text:span><text:span text:style-name="T15">Push </text:span><text:span text:style-name="T12">這棵小樹</text:span></text:p>
            <text:p text:style-name="P27" loext:marker-style-name="T11"><text:span text:style-name="T15">④ </text:span><text:span text:style-name="T12">看到 </text:span><text:span text:style-name="T15">C → </text:span><text:span text:style-name="T12">建節點 </text:span><text:span text:style-name="T15">C</text:span><text:span text:style-name="T12">，</text:span><text:span text:style-name="T15">Push</text:span></text:p>
            <text:p text:style-name="P28" loext:marker-style-name="T11"><text:span text:style-name="T15">⑤ </text:span><text:span text:style-name="T12">看到 </text:span><text:span text:style-name="T15">* → Pop C</text:span><text:span text:style-name="T12">（右子樹），</text:span><text:span text:style-name="T15">Pop +</text:span><text:span text:style-name="T12">樹（左子樹），建 </text:span><text:span text:style-name="T15">* </text:span><text:span text:style-name="T12">根節點</text:span></text:p>
            <text:p text:style-name="P20" loext:marker-style-name="T13"><text:span text:style-name="T14">結果：</text:span><text:span text:style-name="T201">根為 </text:span><text:span text:style-name="T202">*</text:span><text:span text:style-name="T201">，左子樹為 </text:span><text:span text:style-name="T202">+</text:span><text:span text:style-name="T201">（左</text:span><text:span text:style-name="T202">A</text:span><text:span text:style-name="T201">右</text:span><text:span text:style-name="T202">B</text:span><text:span text:style-name="T201">），右子樹為 </text:span><text:span text:style-name="T202">C</text:span></text:p>
          </table:table-cell>
        </table:table-row>
      </table:table>
      <text:h text:style-name="P57" text:outline-level="1" loext:marker-style-name="T7"><text:span text:style-name="T8"/></text:h>
      <text:h text:style-name="P16" text:outline-level="1" loext:marker-style-name="T7"><text:span text:style-name="T8">第八部分：考試速記總整理</text:span></text:h>
      <text:p text:style-name="P5"/>
      <text:h text:style-name="P6" text:outline-level="2" loext:marker-style-name="T9"><text:span text:style-name="T10">六大必背考點（重要度排序）</text:span><text:span text:style-name="T9"/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row table:style-name="表格29.1">
          <table:table-cell table:style-name="表格29.A1" office:value-type="string">
            <text:p text:style-name="Standard" loext:marker-style-name="T34"><text:span text:style-name="T35">重要度</text:span><text:span text:style-name="T34"/></text:p>
          </table:table-cell>
          <table:table-cell table:style-name="表格29.A1" office:value-type="string">
            <text:p text:style-name="Standard" loext:marker-style-name="T34"><text:span text:style-name="T35">考點</text:span><text:span text:style-name="T34"/></text:p>
          </table:table-cell>
          <table:table-cell table:style-name="表格29.A1" office:value-type="string">
            <text:p text:style-name="Standard" loext:marker-style-name="T34"><text:span text:style-name="T35">關鍵記憶</text:span><text:span text:style-name="T34"/></text:p>
          </table:table-cell>
        </table:table-row>
        <table:table-row table:style-name="表格29.1">
          <table:table-cell table:style-name="表格29.A2" office:value-type="string">
            <text:p text:style-name="P10" loext:marker-style-name="T203"><text:span text:style-name="T204">★★★★★</text:span><text:span text:style-name="T203"/></text:p>
          </table:table-cell>
          <table:table-cell table:style-name="表格29.A2" office:value-type="string">
            <text:p text:style-name="P10" loext:marker-style-name="T203"><text:span text:style-name="T204">Postfix </text:span><text:span text:style-name="T205">用 </text:span><text:span text:style-name="T204">Stack </text:span><text:span text:style-name="T205">求值</text:span></text:p>
          </table:table-cell>
          <table:table-cell table:style-name="表格29.A2" office:value-type="string">
            <text:p text:style-name="P10" loext:marker-style-name="T203"><text:span text:style-name="T205">從左往右，運算元 </text:span><text:span text:style-name="T204">Push</text:span><text:span text:style-name="T205">，運算子 </text:span><text:span text:style-name="T204">Pop </text:span><text:span text:style-name="T205">兩個計算</text:span></text:p>
          </table:table-cell>
        </table:table-row>
        <table:table-row table:style-name="表格29.1">
          <table:table-cell table:style-name="表格29.A2" office:value-type="string">
            <text:p text:style-name="P10" loext:marker-style-name="T203"><text:span text:style-name="T204">★★★★★</text:span><text:span text:style-name="T203"/></text:p>
          </table:table-cell>
          <table:table-cell table:style-name="表格29.A2" office:value-type="string">
            <text:p text:style-name="P10" loext:marker-style-name="T203"><text:span text:style-name="T204">Infix → Postfix </text:span><text:span text:style-name="T205">轉換</text:span></text:p>
          </table:table-cell>
          <table:table-cell table:style-name="表格29.A2" office:value-type="string">
            <text:p text:style-name="P10" loext:marker-style-name="T203"><text:span text:style-name="T205">五條規則（括號、優先權、左結合）</text:span><text:span text:style-name="T203"/></text:p>
          </table:table-cell>
        </table:table-row>
        <table:table-row table:style-name="表格29.1">
          <table:table-cell table:style-name="表格29.A2" office:value-type="string">
            <text:p text:style-name="P10" loext:marker-style-name="T203"><text:span text:style-name="T204">★★★★★</text:span><text:span text:style-name="T203"/></text:p>
          </table:table-cell>
          <table:table-cell table:style-name="表格29.A2" office:value-type="string">
            <text:p text:style-name="P10" loext:marker-style-name="T203"><text:span text:style-name="T204">Preorder = Prefix</text:span><text:span text:style-name="T203"/></text:p>
            <text:p text:style-name="P10" loext:marker-style-name="T203"><text:span text:style-name="T204">Inorder = Infix</text:span><text:span text:style-name="T203"/></text:p>
            <text:p text:style-name="P10" loext:marker-style-name="T203"><text:span text:style-name="T204">Postorder = Postfix</text:span><text:span text:style-name="T203"/></text:p>
          </table:table-cell>
          <table:table-cell table:style-name="表格29.A2" office:value-type="string">
            <text:p text:style-name="P10" loext:marker-style-name="T203"><text:span text:style-name="T205">走訪方式 ↔ 表示法對應</text:span><text:span text:style-name="T203"/></text:p>
          </table:table-cell>
        </table:table-row>
        <table:table-row table:style-name="表格29.1">
          <table:table-cell table:style-name="表格29.A5" office:value-type="string">
            <text:p text:style-name="P10" loext:marker-style-name="T203"><text:span text:style-name="T204">★★★★☆</text:span><text:span text:style-name="T203"/></text:p>
          </table:table-cell>
          <table:table-cell table:style-name="表格29.A5" office:value-type="string">
            <text:p text:style-name="P10" loext:marker-style-name="T203"><text:span text:style-name="T204">Expression Tree </text:span><text:span text:style-name="T205">建樹</text:span></text:p>
          </table:table-cell>
          <table:table-cell table:style-name="表格29.A5" office:value-type="string">
            <text:p text:style-name="P10" loext:marker-style-name="T203"><text:span text:style-name="T205">找最後算的運算子 </text:span><text:span text:style-name="T204">= </text:span><text:span text:style-name="T205">根節點，遞迴拆解</text:span></text:p>
          </table:table-cell>
        </table:table-row>
        <table:table-row table:style-name="表格29.1">
          <table:table-cell table:style-name="表格29.A5" office:value-type="string">
            <text:p text:style-name="P10" loext:marker-style-name="T203"><text:span text:style-name="T204">★★★★☆</text:span><text:span text:style-name="T203"/></text:p>
          </table:table-cell>
          <table:table-cell table:style-name="表格29.A5" office:value-type="string">
            <text:p text:style-name="P10" loext:marker-style-name="T203"><text:span text:style-name="T204">Prefix </text:span><text:span text:style-name="T205">用 </text:span><text:span text:style-name="T204">Stack </text:span><text:span text:style-name="T205">求值</text:span></text:p>
          </table:table-cell>
          <table:table-cell table:style-name="表格29.A5" office:value-type="string">
            <text:p text:style-name="P10" loext:marker-style-name="T203"><text:span text:style-name="T205">從右往左，先 </text:span><text:span text:style-name="T204">Pop </text:span><text:span text:style-name="T205">的是左運算元</text:span></text:p>
          </table:table-cell>
        </table:table-row>
        <table:table-row table:style-name="表格29.1">
          <table:table-cell table:style-name="表格29.A7" office:value-type="string">
            <text:p text:style-name="P10" loext:marker-style-name="T203"><text:span text:style-name="T204">★★★☆☆</text:span><text:span text:style-name="T203"/></text:p>
          </table:table-cell>
          <table:table-cell table:style-name="表格29.A7" office:value-type="string">
            <text:p text:style-name="P10" loext:marker-style-name="T203"><text:span text:style-name="T204">Postfix → Expression Tree</text:span><text:span text:style-name="T203"/></text:p>
          </table:table-cell>
          <table:table-cell table:style-name="表格29.A7" office:value-type="string">
            <text:p text:style-name="P10" loext:marker-style-name="T203"><text:span text:style-name="T205">運算元建節點 </text:span><text:span text:style-name="T204">Push</text:span><text:span text:style-name="T205">，運算子合併兩棵子樹</text:span></text:p>
          </table:table-cell>
        </table:table-row>
      </table:table>
      <text:p text:style-name="P11"/>
      <text:h text:style-name="P6" text:outline-level="2" loext:marker-style-name="T9"><text:span text:style-name="T9">Infix → Postfix </text:span><text:span text:style-name="T10">考前速記卡</text:span></text:h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15" loext:marker-style-name="T27"><text:span text:style-name="T27">1. Operand（運算元） → 直接輸出</text:span><text:span text:style-name="T27"/></text:p>
            <text:p text:style-name="P27" loext:marker-style-name="T27"><text:span text:style-name="T27">2. <text:s/>( <text:s/>→ Push</text:span><text:span text:style-name="T27"/></text:p>
            <text:p text:style-name="P27" loext:marker-style-name="T27"><text:span text:style-name="T27">3. <text:s/>) <text:s/>→ Pop 直到 (（括號不輸出）</text:span><text:span text:style-name="T27"/></text:p>
            <text:p text:style-name="P27" loext:marker-style-name="T27"><text:span text:style-name="T27">4. Operator → Stack 頂優先 ≥ 自己 → 先 Pop，再 Push</text:span><text:span text:style-name="T27"/></text:p>
            <text:p text:style-name="P28" loext:marker-style-name="T27"><text:span text:style-name="T27">5. 讀完 → Stack 全部 Pop 輸出</text:span><text:span text:style-name="T27"/></text:p>
          </table:table-cell>
        </table:table-row>
      </table:table>
      <text:p text:style-name="P22"/>
      <text:h text:style-name="P6" text:outline-level="2" loext:marker-style-name="T9"><text:span text:style-name="T10">三種表示法互轉速查表</text:span><text:span text:style-name="T9"/></text:h>
      <table:table table:name="表格31" table:style-name="表格31">
        <table:table-column table:style-name="表格31.A" table:number-columns-repeated="4"/>
        <table:table-row table:style-name="表格31.1">
          <table:table-cell table:style-name="表格31.A1" office:value-type="string">
            <text:p text:style-name="Standard" loext:marker-style-name="T116"><text:span text:style-name="T117">表示法</text:span><text:span text:style-name="T116"/></text:p>
          </table:table-cell>
          <table:table-cell table:style-name="表格31.A1" office:value-type="string">
            <text:p text:style-name="Standard" loext:marker-style-name="T116"><text:span text:style-name="T117">算式範例</text:span><text:span text:style-name="T116"/></text:p>
          </table:table-cell>
          <table:table-cell table:style-name="表格31.A1" office:value-type="string">
            <text:p text:style-name="Standard" loext:marker-style-name="T116"><text:span text:style-name="T117">特點</text:span><text:span text:style-name="T116"/></text:p>
          </table:table-cell>
          <table:table-cell table:style-name="表格31.A1" office:value-type="string">
            <text:p text:style-name="Standard" loext:marker-style-name="T116"><text:span text:style-name="T117">求值方法</text:span><text:span text:style-name="T116"/></text:p>
          </table:table-cell>
        </table:table-row>
        <table:table-row table:style-name="表格31.1">
          <table:table-cell table:style-name="表格31.A2" office:value-type="string">
            <text:p text:style-name="Standard" loext:marker-style-name="T203"><text:span text:style-name="T204">Prefix </text:span><text:span text:style-name="T205">前置式</text:span></text:p>
          </table:table-cell>
          <table:table-cell table:style-name="表格31.A2" office:value-type="string">
            <text:p text:style-name="Standard" loext:marker-style-name="T203"><text:span text:style-name="T204">+AB</text:span><text:span text:style-name="T203"/></text:p>
          </table:table-cell>
          <table:table-cell table:style-name="表格31.A2" office:value-type="string">
            <text:p text:style-name="Standard" loext:marker-style-name="T203"><text:span text:style-name="T205">運算子在前</text:span><text:span text:style-name="T203"/></text:p>
          </table:table-cell>
          <table:table-cell table:style-name="表格31.A2" office:value-type="string">
            <text:p text:style-name="Standard" loext:marker-style-name="T203"><text:span text:style-name="T204">Stack</text:span><text:span text:style-name="T205">，從右往左讀</text:span></text:p>
          </table:table-cell>
        </table:table-row>
        <table:table-row table:style-name="表格31.1">
          <table:table-cell table:style-name="表格31.A3" office:value-type="string">
            <text:p text:style-name="Standard" loext:marker-style-name="T203"><text:span text:style-name="T204">Infix </text:span><text:span text:style-name="T205">中置式</text:span></text:p>
          </table:table-cell>
          <table:table-cell table:style-name="表格31.A3" office:value-type="string">
            <text:p text:style-name="Standard" loext:marker-style-name="T203"><text:span text:style-name="T204">A+B</text:span><text:span text:style-name="T203"/></text:p>
          </table:table-cell>
          <table:table-cell table:style-name="表格31.A3" office:value-type="string">
            <text:p text:style-name="Standard" loext:marker-style-name="T203"><text:span text:style-name="T205">人類習慣寫法，需括號</text:span><text:span text:style-name="T203"/></text:p>
          </table:table-cell>
          <table:table-cell table:style-name="表格31.A3" office:value-type="string">
            <text:p text:style-name="Standard" loext:marker-style-name="T203"><text:span text:style-name="T205">需考慮優先權</text:span><text:span text:style-name="T203"/></text:p>
          </table:table-cell>
        </table:table-row>
        <table:table-row table:style-name="表格31.1">
          <table:table-cell table:style-name="表格31.A4" office:value-type="string">
            <text:p text:style-name="Standard" loext:marker-style-name="T203"><text:span text:style-name="T204">Postfix </text:span><text:span text:style-name="T205">後置式</text:span></text:p>
          </table:table-cell>
          <table:table-cell table:style-name="表格31.A4" office:value-type="string">
            <text:p text:style-name="Standard" loext:marker-style-name="T203"><text:span text:style-name="T204">AB+</text:span><text:span text:style-name="T203"/></text:p>
          </table:table-cell>
          <table:table-cell table:style-name="表格31.A4" office:value-type="string">
            <text:p text:style-name="Standard" loext:marker-style-name="T203"><text:span text:style-name="T205">無括號，電腦最愛</text:span><text:span text:style-name="T203"/></text:p>
          </table:table-cell>
          <table:table-cell table:style-name="表格31.A4" office:value-type="string">
            <text:p text:style-name="Standard" loext:marker-style-name="T203"><text:span text:style-name="T204">Stack</text:span><text:span text:style-name="T205">，從左往右讀</text:span></text:p>
          </table:table-cell>
        </table:table-row>
      </table:table>
      <text:p text:style-name="P11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58" loext:marker-style-name="T206"><text:span text:style-name="T207">最終核心記憶句（一句話串起整章）</text:span><text:span text:style-name="T206"/></text:p>
            <text:p text:style-name="P59" loext:marker-style-name="T208"><text:span text:style-name="T209">「</text:span><text:span text:style-name="T210">Expression Tree </text:span><text:span text:style-name="T209">求值 </text:span><text:span text:style-name="T210">= Postorder </text:span><text:span text:style-name="T209">走訪 </text:span><text:span text:style-name="T210">= Postfix </text:span><text:span text:style-name="T209">計算 </text:span><text:span text:style-name="T210">= Stack</text:span><text:span text:style-name="T209">」</text:span></text:p>
            <text:p text:style-name="P60" loext:marker-style-name="T11"><text:span text:style-name="T12">只要懂這一句，整章 </text:span><text:span text:style-name="T15">Expression Tree </text:span><text:span text:style-name="T12">的題目就全部打通。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12cm" style:contextual-spacing="false"/>
      <style:text-properties fo:color="#1f3864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176cm" style:contextual-spacing="false"/>
      <style:text-properties fo:color="#1a6b72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18cm" fo:margin-bottom="0.141cm" style:contextual-spacing="false"/>
      <style:text-properties fo:color="#7b3f00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en" fo:country="US" fo:font-weight="bold" style:letter-kerning="false" style:font-name-asian="Arial2" style:font-family-asian="Arial" style:font-family-generic-asian="system" style:font-pitch-asian="variable" style:font-size-asian="11pt" style:language-asian="zh" style:country-asian="TW" style:font-weight-asian="bold" style:font-name-complex="Arial2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0T01:48:15</meta:creation-date>
    <meta:initial-creator>Un-named</meta:initial-creator>
    <dc:language>en-US</dc:language>
    <dc:date>2026-06-29T08:21:54.880000000</dc:date>
    <meta:editing-cycles>98</meta:editing-cycles>
    <meta:editing-duration>PT13H22M33S</meta:editing-duration>
    <meta:generator>LibreOffice/26.2.4.2$Windows_X86_64 LibreOffice_project/0229ac93fcf0d7cbc6376066c6f35021cef002dc</meta:generator>
    <meta:document-statistic meta:table-count="32" meta:image-count="0" meta:object-count="0" meta:page-count="15" meta:paragraph-count="611" meta:word-count="4144" meta:character-count="7654" meta:non-whitespace-character-count="6236"/>
    <meta:user-defined meta:name="AppVersion">15.0000</meta:user-defined>
  </office:meta>
</office:document-meta>
</file>