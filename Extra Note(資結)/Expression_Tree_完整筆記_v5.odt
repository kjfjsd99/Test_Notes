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13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14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15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16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17" style:family="paragraph" style:parent-style-name="Standard">
      <style:text-properties fo:color="#444444" loext:opacity="100%" style:font-name="Arial" fo:font-size="11pt" fo:background-color="#ffff00" style:font-name-asian="Arial2" style:font-size-asian="11pt"/>
    </style:style>
    <style:style style:name="P18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19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20" style:family="paragraph" style:parent-style-name="Standard"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21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23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24" style:family="paragraph" style:parent-style-name="Standard">
      <style:text-properties fo:color="#22b14c" loext:opacity="100%" style:font-name="Courier New" fo:font-size="10pt" style:font-name-asian="Courier New1" style:font-size-asian="10pt"/>
    </style:style>
    <style:style style:name="P25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26" style:family="paragraph" style:parent-style-name="Standard">
      <style:text-properties fo:color="#22b14c" loext:opacity="100%" style:font-name="Arial" fo:font-size="11pt" fo:font-weight="bold" fo:background-color="#ffff00" style:font-name-asian="Arial2" style:font-size-asian="11pt" style:font-weight-asian="bold"/>
    </style:style>
    <style:style style:name="P27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28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29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/>
    </style:style>
    <style:style style:name="P30" style:family="paragraph" style:parent-style-name="Standard">
      <style:text-properties fo:color="#c00000" loext:opacity="100%" style:font-name="Arial" fo:font-size="11pt" fo:background-color="#ffff00" style:font-name-asian="Arial2" style:font-size-asian="11pt"/>
    </style:style>
    <style:style style:name="P31" style:family="paragraph" style:parent-style-name="Standard">
      <style:text-properties fo:color="#ffff00" loext:opacity="100%" style:font-name="Arial" fo:font-size="11pt" fo:font-weight="bold" fo:background-color="#651fff" style:font-name-asian="Arial2" style:font-size-asian="11pt" style:font-weight-asian="bold"/>
    </style:style>
    <style:style style:name="P32" style:family="paragraph" style:parent-style-name="Standard">
      <style:text-properties fo:color="#c6ff00" loext:opacity="100%" style:font-name="Arial" fo:font-size="11pt" fo:font-weight="bold" fo:background-color="#f50057" style:font-name-asian="Arial2" style:font-size-asian="11pt" style:font-weight-asian="bold"/>
    </style:style>
    <style:style style:name="P33" style:family="paragraph" style:parent-style-name="Standard">
      <style:text-properties fo:color="#eeff41" loext:opacity="100%" style:font-name="Arial" fo:font-size="11pt" fo:font-weight="bold" fo:background-color="#ff6e40" style:font-name-asian="Arial2" style:font-size-asian="11pt" style:font-weight-asian="bold" style:font-weight-complex="bold"/>
    </style:style>
    <style:style style:name="P34" style:family="paragraph" style:parent-style-name="Standard">
      <style:text-properties fo:background-color="#ffff00"/>
    </style:style>
    <style:style style:name="P35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36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37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38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41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42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43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44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45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46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47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48" style:family="paragraph" style:parent-style-name="Standard">
      <style:paragraph-properties fo:margin-top="0.106cm" fo:margin-bottom="0.106cm" style:contextual-spacing="false"/>
    </style:style>
    <style:style style:name="P49" style:family="paragraph" style:parent-style-name="Standard">
      <style:paragraph-properties fo:margin-top="0.071cm" fo:margin-bottom="0.071cm" style:contextual-spacing="false"/>
    </style:style>
    <style:style style:name="P50" style:family="paragraph" style:parent-style-name="Standard">
      <style:paragraph-properties fo:margin-top="0.035cm" fo:margin-bottom="0.035cm" style:contextual-spacing="false"/>
    </style:style>
    <style:style style:name="P51" style:family="paragraph" style:parent-style-name="Standard">
      <style:paragraph-properties fo:margin-top="0.071cm" fo:margin-bottom="0.035cm" style:contextual-spacing="false"/>
    </style:style>
    <style:style style:name="P52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53" style:family="paragraph" style:parent-style-name="Standard">
      <style:paragraph-properties fo:margin-top="0.035cm" fo:margin-bottom="0.071cm" style:contextual-spacing="false"/>
    </style:style>
    <style:style style:name="P54" style:family="paragraph" style:parent-style-name="Standard">
      <style:paragraph-properties fo:margin-top="0cm" fo:margin-bottom="0.035cm" style:contextual-spacing="false"/>
    </style:style>
    <style:style style:name="P55" style:family="paragraph" style:parent-style-name="Standard">
      <style:paragraph-properties fo:margin-top="0.353cm" fo:margin-bottom="0.141cm" style:contextual-spacing="false"/>
    </style:style>
    <style:style style:name="P56" style:family="paragraph" style:parent-style-name="Standard">
      <style:paragraph-properties fo:margin-top="0.071cm" fo:margin-bottom="0.018cm" style:contextual-spacing="false"/>
    </style:style>
    <style:style style:name="P57" style:family="paragraph" style:parent-style-name="Standard">
      <style:paragraph-properties fo:margin-top="0cm" fo:margin-bottom="0.018cm" style:contextual-spacing="false"/>
    </style:style>
    <style:style style:name="P58" style:family="paragraph" style:parent-style-name="Standard">
      <style:paragraph-properties fo:margin-top="0cm" fo:margin-bottom="0.106cm" style:contextual-spacing="false"/>
    </style:style>
    <style:style style:name="P59" style:family="paragraph" style:parent-style-name="Standard">
      <style:paragraph-properties fo:margin-top="0.018cm" fo:margin-bottom="0.018cm" style:contextual-spacing="false"/>
    </style:style>
    <style:style style:name="P60" style:family="paragraph" style:parent-style-name="Standard">
      <style:paragraph-properties fo:margin-top="0.018cm" fo:margin-bottom="0.071cm" style:contextual-spacing="false"/>
    </style:style>
    <style:style style:name="P61" style:family="paragraph" style:parent-style-name="Standard">
      <style:paragraph-properties fo:margin-top="0.018cm" fo:margin-bottom="0.035cm" style:contextual-spacing="false"/>
    </style:style>
    <style:style style:name="P62" style:family="paragraph" style:parent-style-name="Standard">
      <style:paragraph-properties fo:margin-top="0.035cm" fo:margin-bottom="0.018cm" style:contextual-spacing="false"/>
    </style:style>
    <style:style style:name="P63" style:family="paragraph" style:parent-style-name="Standard">
      <style:paragraph-properties fo:margin-top="0.106cm" fo:margin-bottom="0.035cm" style:contextual-spacing="false"/>
    </style:style>
    <style:style style:name="P64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4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6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8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0" style:family="text">
      <style:text-properties fo:color="#1a6b72" loext:opacity="100%" style:font-name="Arial" fo:font-size="13pt" fo:font-weight="bold" style:font-name-asian="Arial2" style:font-size-asian="13pt" style:font-weight-asian="bold"/>
    </style:style>
    <style:style style:name="T41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2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3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4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5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fo:color="#1a6b72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8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9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50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2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3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4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5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6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7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8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60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61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2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3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4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5" style:family="text">
      <style:text-properties fo:color="#444444" loext:opacity="100%" style:font-name="Arial" fo:font-size="9pt" style:font-size-asian="9pt" style:font-name-complex="Arial2" style:font-size-complex="9pt"/>
    </style:style>
    <style:style style:name="T66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7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9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70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71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2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3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5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6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7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8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9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80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81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2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3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5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6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7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8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9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90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91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2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5" style:family="text">
      <style:text-properties fo:color="#18ffff" loext:opacity="100%"/>
    </style:style>
    <style:style style:name="T96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7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8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99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100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1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02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03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4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5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6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0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1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2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13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14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15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6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17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18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19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0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21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22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3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4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25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27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8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9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30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2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3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4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36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37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38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39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40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1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42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3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4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45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46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47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8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49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ffd740" loext:opacity="100%" fo:font-weight="bold" fo:background-color="#651fff" loext:char-shading-value="0" style:font-weight-asian="bold" style:font-weight-complex="bold"/>
    </style:style>
    <style:style style:name="T151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2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3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54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55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56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7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58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59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60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1" style:family="text">
      <style:text-properties fo:color="#ffff00" loext:opacity="100%" fo:background-color="#ff1744" loext:char-shading-value="0"/>
    </style:style>
    <style:style style:name="T162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63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64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65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66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67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69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70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71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2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73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4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75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76" style:family="text">
      <style:text-properties fo:color="#eeff41" loext:opacity="100%" fo:font-weight="bold" fo:background-color="#ff6e40" loext:char-shading-value="0" style:font-weight-asian="bold" style:font-weight-complex="bold"/>
    </style:style>
    <style:style style:name="T177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78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79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80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181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82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3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84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85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86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87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88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89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90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91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92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93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4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95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96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97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98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9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0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1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2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03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04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05" style:family="text">
      <style:text-properties fo:background-color="#ffff00" loext:char-shading-value="0"/>
    </style:style>
    <style:style style:name="T206" style:family="text">
      <style:text-properties fo:font-weight="bold" fo:background-color="#ffff00" loext:char-shading-value="0" style:font-weight-asian="bold" style:font-weight-complex="bold"/>
    </style:style>
    <style:style style:name="T207" style:family="text">
      <style:text-properties fo:font-weight="bold" fo:background-color="#ffd740" loext:char-shading-value="0" style:font-weight-asian="bold" style:font-weight-complex="bold"/>
    </style:style>
    <style:style style:name="T208" style:family="text">
      <style:text-properties fo:font-weight="bold" fo:background-color="#76ff03" loext:char-shading-value="0" style:font-weight-asian="bold" style:font-weight-complex="bold"/>
    </style:style>
    <style:style style:name="T209" style:family="text">
      <style:text-properties fo:background-color="#ffd740" loext:char-shading-value="0"/>
    </style:style>
    <style:style style:name="T210" style:family="text">
      <style:text-properties fo:background-color="#18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9" loext:marker-style-name="T2"><text:span text:style-name="T1">運算式樹 </text:span><text:span text:style-name="T7">Expression Tree</text:span></text:p>
            <text:p text:style-name="P40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35" text:outline-level="1" loext:marker-style-name="T13"><text:span text:style-name="T12">第一部分：基本定義</text:span><text:span text:style-name="T13"/></text:h>
      <text:p text:style-name="P2"/>
      <text:h text:style-name="P38" text:outline-level="2" loext:marker-style-name="T30"><text:span text:style-name="T29">什麼是運算式樹 </text:span><text:span text:style-name="T30">(Expression Tree)</text:span><text:span text:style-name="T29">？</text:span></text:h>
      <text:p text:style-name="P48" loext:marker-style-name="T49"><text:span text:style-name="T48">運算式樹是一種特殊的二元樹，用來表示算術或邏輯運算式。它把整個算式的結構以樹狀方式呈現，讓電腦能清楚理解每一個運算的先後順序。</text:span><text:span text:style-name="T49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4"><text:span text:style-name="T33">核心規則（考試必記）</text:span><text:span text:style-name="T34"/></text:p>
            <text:p text:style-name="P5" loext:marker-style-name="T49"><text:span text:style-name="T66">• </text:span><text:span text:style-name="T81">葉節點 </text:span><text:span text:style-name="T82">(Leaf Node)</text:span><text:span text:style-name="T81">：存放 運算元 </text:span><text:span text:style-name="T82">(Operand)</text:span><text:span text:style-name="T48">，例如 </text:span><text:span text:style-name="T66">A</text:span><text:span text:style-name="T48">、</text:span><text:span text:style-name="T66">B</text:span><text:span text:style-name="T48">、</text:span><text:span text:style-name="T66">3</text:span><text:span text:style-name="T48">、</text:span><text:span text:style-name="T66">5</text:span></text:p>
            <text:p text:style-name="P5" loext:marker-style-name="T49"><text:span text:style-name="T66">• </text:span><text:span text:style-name="T83">內部節點 </text:span><text:span text:style-name="T88">(Internal Node)</text:span><text:span text:style-name="T83">：存放 運算子 </text:span><text:span text:style-name="T88">(Operator)</text:span><text:span text:style-name="T48">，例如 </text:span><text:span text:style-name="T66">+</text:span><text:span text:style-name="T48">、</text:span><text:span text:style-name="T66">-</text:span><text:span text:style-name="T48">、</text:span><text:span text:style-name="T66">×</text:span><text:span text:style-name="T48">、</text:span><text:span text:style-name="T66">÷</text:span></text:p>
            <text:p text:style-name="P5" loext:marker-style-name="T49"><text:span text:style-name="T66">•</text:span><text:span text:style-name="T96"> </text:span><text:span text:style-name="T112">通常是 </text:span><text:span text:style-name="T113">Full Binary Tree</text:span><text:span text:style-name="T48">（每個節點恰好有 </text:span><text:span text:style-name="T66">0 </text:span><text:span text:style-name="T48">或 </text:span><text:span text:style-name="T66">2 </text:span><text:span text:style-name="T48">個子節點）</text:span></text:p>
            <text:p text:style-name="P5" loext:marker-style-name="T117"><text:span text:style-name="T114">• </text:span><text:span text:style-name="T116">若允許一元運算子（如 </text:span><text:span text:style-name="T114">sin</text:span><text:span text:style-name="T116">、</text:span><text:span text:style-name="T114">sqrt</text:span><text:span text:style-name="T116">），則不一定是 </text:span><text:span text:style-name="T114">Full Binary Tree</text:span></text:p>
          </table:table-cell>
        </table:table-row>
      </table:table>
      <text:p text:style-name="P6"/>
      <text:h text:style-name="P38" text:outline-level="2" loext:marker-style-name="T30"><text:span text:style-name="T29">範例：</text:span><text:span text:style-name="T30">(A+B)×C </text:span><text:span text:style-name="T29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1" loext:marker-style-name="T24"><text:span text:style-name="T24"><text:s text:c="7"/>×</text:span><text:span text:style-name="T24"/></text:p>
            <text:p text:style-name="P42" loext:marker-style-name="T25"><text:span text:style-name="T25"><text:s text:c="6"/>/ \</text:span><text:span text:style-name="T25"/></text:p>
            <text:p text:style-name="P42" loext:marker-style-name="T25"><text:span text:style-name="T25"><text:s text:c="25"/>+ <text:s text:c="2"/>C <text:s text:c="3"/>← 葉節點（運算元）</text:span><text:span text:style-name="T25"/></text:p>
            <text:p text:style-name="P43" loext:marker-style-name="T25"><text:span text:style-name="T25"><text:s text:c="4"/>/ \</text:span><text:span text:style-name="T25"/></text:p>
            <text:p text:style-name="P43" loext:marker-style-name="T25"><text:span text:style-name="T25"><text:s text:c="22"/>A <text:s text:c="2"/>B <text:s/>← 葉節點（運算元）</text:span><text:span text:style-name="T25"/></text:p>
            <text:p text:style-name="P7" loext:marker-style-name="T37"><text:span text:style-name="T130">× </text:span><text:span text:style-name="T131">和 </text:span><text:span text:style-name="T130">+ </text:span><text:span text:style-name="T131">是內部節點（運算子）</text:span><text:span text:style-name="T36">；</text:span><text:span text:style-name="T90">A</text:span><text:span text:style-name="T85">、</text:span><text:span text:style-name="T90">B</text:span><text:span text:style-name="T85">、</text:span><text:span text:style-name="T90">C </text:span><text:span text:style-name="T85">是葉節點（運算元）</text:span></text:p>
          </table:table-cell>
        </table:table-row>
      </table:table>
      <text:p text:style-name="P6"/>
      <text:p text:style-name="Standard"/>
      <text:h text:style-name="P36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48" loext:marker-style-name="T49"><text:span text:style-name="T48">這是 </text:span><text:span text:style-name="T66">Expression Tree </text:span><text:span text:style-name="T48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38"><text:span text:style-name="T136">Preorder</text:span><text:span text:style-name="T137">（</text:span><text:span text:style-name="T148">前序</text:span><text:span text:style-name="T137">）</text:span></text:p>
          </table:table-cell>
          <table:table-cell table:style-name="表格4.A2" office:value-type="string">
            <text:p text:style-name="Standard" loext:marker-style-name="T152"><text:span text:style-name="T151">根 → 左 → 右</text:span><text:span text:style-name="T152"/></text:p>
          </table:table-cell>
          <table:table-cell table:style-name="表格4.A2" office:value-type="string">
            <text:p text:style-name="Standard" loext:marker-style-name="T138"><text:span text:style-name="T99">Pre</text:span><text:span text:style-name="T136">fix</text:span><text:span text:style-name="T137">（前置表示法）</text:span></text:p>
          </table:table-cell>
          <table:table-cell table:style-name="表格4.A2" office:value-type="string">
            <text:p text:style-name="Standard" loext:marker-style-name="T138"><text:span text:style-name="T137">第一個元素就是根</text:span><text:span text:style-name="T138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21"><text:span text:style-name="T126">Inorder</text:span><text:span text:style-name="T120">（</text:span><text:span text:style-name="T148">中序</text:span><text:span text:style-name="T120">）</text:span></text:p>
          </table:table-cell>
          <table:table-cell table:style-name="表格4.A3" office:value-type="string">
            <text:p text:style-name="Standard" loext:marker-style-name="T163"><text:span text:style-name="T162">左 → 根 → 右</text:span><text:span text:style-name="T163"/></text:p>
          </table:table-cell>
          <table:table-cell table:style-name="表格4.A3" office:value-type="string">
            <text:p text:style-name="Standard" loext:marker-style-name="T121"><text:span text:style-name="T99">In</text:span><text:span text:style-name="T126">fix</text:span><text:span text:style-name="T120">（中置表示法）</text:span></text:p>
          </table:table-cell>
          <table:table-cell table:style-name="表格4.A3" office:value-type="string">
            <text:p text:style-name="P52" loext:marker-style-name="T121"/>
          </table:table-cell>
        </table:table-row>
        <table:table-row table:style-name="表格4.1">
          <table:table-cell table:style-name="表格4.A4" office:value-type="string">
            <text:p text:style-name="Standard" loext:marker-style-name="T37"><text:span text:style-name="T43">Postorder</text:span><text:span text:style-name="T36">（</text:span><text:span text:style-name="T148">後序</text:span><text:span text:style-name="T36">）</text:span></text:p>
          </table:table-cell>
          <table:table-cell table:style-name="表格4.A4" office:value-type="string">
            <text:p text:style-name="Standard" loext:marker-style-name="T102"><text:span text:style-name="T101">左 → 右 → 根</text:span><text:span text:style-name="T102"/></text:p>
          </table:table-cell>
          <table:table-cell table:style-name="表格4.A4" office:value-type="string">
            <text:p text:style-name="Standard" loext:marker-style-name="T37"><text:span text:style-name="T99">Post</text:span><text:span text:style-name="T43">fix</text:span><text:span text:style-name="T36">（後置表示法）</text:span></text:p>
          </table:table-cell>
          <table:table-cell table:style-name="表格4.A4" office:value-type="string">
            <text:p text:style-name="Standard" loext:marker-style-name="T37"><text:span text:style-name="T36">最後才記錄根節點</text:span><text:span text:style-name="T37"/></text:p>
          </table:table-cell>
        </table:table-row>
      </table:table>
      <text:p text:style-name="P6"/>
      <text:h text:style-name="P38" text:outline-level="2" loext:marker-style-name="T30"><text:span text:style-name="T29">記憶口訣（考試當場不忘）</text:span><text:span text:style-name="T30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40"><text:span text:style-name="T143">Preorder</text:span><text:span text:style-name="T139">（前序）：進房間立刻簽到 → 先記根，再走左右</text:span></text:p>
            <text:p text:style-name="P5" loext:marker-style-name="T119"><text:span text:style-name="T115">Inorder</text:span><text:span text:style-name="T118">（中序）：先進左房間，才簽到，再進右房間</text:span></text:p>
            <text:p text:style-name="P9" loext:marker-style-name="T34"><text:span text:style-name="T45">Postorder</text:span><text:span text:style-name="T33">（後序）：所有房間都查完，最後才簽退 → 根最後記錄</text:span></text:p>
          </table:table-cell>
        </table:table-row>
      </table:table>
      <text:p text:style-name="P6"/>
      <text:h text:style-name="P38" text:outline-level="2" loext:marker-style-name="T30"><text:span text:style-name="T29">重要注意事項：</text:span><text:span text:style-name="T30">Inorder </text:span><text:span text:style-name="T29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70"><text:span text:style-name="T169">「中序走訪 </text:span><text:span text:style-name="T172">= </text:span><text:span text:style-name="T169">原始算式」這個說法並不完全準確！</text:span></text:p>
            <text:p text:style-name="P5" loext:marker-style-name="T49"><text:span text:style-name="T48">範例：樹的根為 </text:span><text:span text:style-name="T66">×</text:span><text:span text:style-name="T48">，左子樹為 </text:span><text:span text:style-name="T66">(A+B)</text:span><text:span text:style-name="T48">，右子樹為 </text:span><text:span text:style-name="T66">C</text:span></text:p>
            <text:p text:style-name="P5" loext:marker-style-name="T174"><text:span text:style-name="T174">中序走訪結果：A+B×C（少了括號！）</text:span><text:span text:style-name="T174"/></text:p>
            <text:p text:style-name="P9" loext:marker-style-name="T144"><text:span text:style-name="T144">原始算式應為：(A+B)×C（有括號才正確）</text:span><text:span text:style-name="T144"/></text:p>
            <text:p text:style-name="P54" loext:marker-style-name="T49"><text:span text:style-name="T48">結論：</text:span><text:span text:style-name="T105">中序走訪還原原式時，必要時需補上括號</text:span><text:span text:style-name="T48">，考試要特別留意。</text:span></text:p>
          </table:table-cell>
        </table:table-row>
      </table:table>
      <text:p text:style-name="Standard"/>
      <text:h text:style-name="P36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48" loext:marker-style-name="T49"><text:span text:style-name="T48">核心原則只有一句：</text:span><text:span text:style-name="T49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44" loext:marker-style-name="T19"><text:span text:style-name="T18">「</text:span><text:span text:style-name="T175">找最後執行的運算子</text:span><text:span text:style-name="T18">，</text:span><text:span text:style-name="T87">它就是目前子樹的根節點</text:span><text:span text:style-name="T18">。」</text:span></text:p>
          </table:table-cell>
        </table:table-row>
      </table:table>
      <text:p text:style-name="P6"/>
      <text:h text:style-name="P38" text:outline-level="2" loext:marker-style-name="T30"><text:span text:style-name="T30">112</text:span><text:span text:style-name="T29">題實戰：</text:span><text:span text:style-name="T31">A/B-C+D×E-A×C</text:span><text:span text:style-name="T30"> → </text:span><text:span text:style-name="T29">建樹步驟</text:span></text:h>
      <text:p text:style-name="P48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4">1</text:span></text:p>
          </table:table-cell>
          <table:table-cell table:style-name="表格8.A2" office:value-type="string">
            <text:p text:style-name="P5" loext:marker-style-name="T55"><text:span text:style-name="T103">找高優先權運算</text:span><text:span text:style-name="T54">（</text:span><text:span text:style-name="T177">乘除先</text:span><text:span text:style-name="T54">）</text:span></text:p>
          </table:table-cell>
          <table:table-cell table:style-name="表格8.A2" office:value-type="string">
            <text:p text:style-name="P5" loext:marker-style-name="T70"><text:span text:style-name="T70">圈出：</text:span><text:span text:style-name="T181">(A/B)</text:span><text:span text:style-name="T70">、</text:span><text:span text:style-name="T181">(D×E)</text:span><text:span text:style-name="T70">、</text:span><text:span text:style-name="T181">(A×C)</text:span></text:p>
            <text:p text:style-name="P5" loext:marker-style-name="T70"><text:span text:style-name="T70">整理：(A/B)-C+(D×E)-(A×C)</text:span><text:span text:style-name="T70"/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4">2</text:span></text:p>
          </table:table-cell>
          <table:table-cell table:style-name="表格8.A3" office:value-type="string">
            <text:p text:style-name="P5" loext:marker-style-name="T154"><text:span text:style-name="T153">找最後執行的運算子</text:span><text:span text:style-name="T154"/></text:p>
          </table:table-cell>
          <table:table-cell table:style-name="表格8.A3" office:value-type="string">
            <text:p text:style-name="P5" loext:marker-style-name="T70"><text:span text:style-name="T91">加、減同優先 → 左結合（由左往右）<text:line-break/><text:line-break/>(A/B)-C+(D×E)-(A×C)<text:line-break/>= (((A/B)-C)+(D×E))-(A×C)<text:line-break/><text:line-break/>最外層（最後）的運算子就是 Root<text:line-break/>⇒ Root = -</text:span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4">3</text:span></text:p>
          </table:table-cell>
          <table:table-cell table:style-name="表格8.A2" office:value-type="string">
            <text:p text:style-name="P5" loext:marker-style-name="T184"><text:span text:style-name="T183">切左右子樹</text:span><text:span text:style-name="T184"/></text:p>
          </table:table-cell>
          <table:table-cell table:style-name="表格8.A2" office:value-type="string">
            <text:p text:style-name="P5" loext:marker-style-name="T71"><text:span text:style-name="T71">左子樹：((A/B)-C)+(D×E)</text:span><text:span text:style-name="T71"/></text:p>
            <text:p text:style-name="P5" loext:marker-style-name="T71"><text:span text:style-name="T71">右子樹：(A×C)</text:span><text:span text:style-name="T71"/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4">4</text:span></text:p>
          </table:table-cell>
          <table:table-cell table:style-name="表格8.A3" office:value-type="string">
            <text:p text:style-name="P5" loext:marker-style-name="T55"><text:span text:style-name="T54">遞迴處理左子樹</text:span><text:span text:style-name="T55"/></text:p>
          </table:table-cell>
          <table:table-cell table:style-name="表格8.A3" office:value-type="string">
            <text:p text:style-name="P5" loext:marker-style-name="T70"><text:span text:style-name="T185">左子樹最後算 +，再往下拆</text:span><text:span text:style-name="T70">：</text:span></text:p>
            <text:p text:style-name="P5" loext:marker-style-name="T71"><text:span text:style-name="T71">左：(A/B)-C，右：D×E</text:span><text:span text:style-name="T71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4">5</text:span></text:p>
          </table:table-cell>
          <table:table-cell table:style-name="表格8.A2" office:value-type="string">
            <text:p text:style-name="P5" loext:marker-style-name="T55"><text:span text:style-name="T54">遞迴處理 </text:span><text:span text:style-name="T75">(A/B)-C</text:span></text:p>
          </table:table-cell>
          <table:table-cell table:style-name="表格8.A2" office:value-type="string">
            <text:p text:style-name="P5" loext:marker-style-name="T70"><text:span text:style-name="T185">最後算 -</text:span><text:span text:style-name="T70">，</text:span><text:span text:style-name="T71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4">6</text:span></text:p>
          </table:table-cell>
          <table:table-cell table:style-name="表格8.A3" office:value-type="string">
            <text:p text:style-name="P5" loext:marker-style-name="T55"><text:span text:style-name="T54">處理 </text:span><text:span text:style-name="T75">A/B</text:span></text:p>
          </table:table-cell>
          <table:table-cell table:style-name="表格8.A3" office:value-type="string">
            <text:p text:style-name="P5" loext:marker-style-name="T70"><text:span text:style-name="T185">最後算 /</text:span><text:span text:style-name="T70">，</text:span><text:span text:style-name="T71">左：A，右：B</text:span></text:p>
          </table:table-cell>
        </table:table-row>
      </table:table>
      <text:p text:style-name="P10"/>
      <text:p text:style-name="P55" loext:marker-style-name="T125"><text:span text:style-name="T128">112</text:span><text:span text:style-name="T124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6" loext:marker-style-name="T26"><text:span text:style-name="T26"><text:s text:c="15"/>- <text:s text:c="9"/>&lt;- 根節點（最後執行）</text:span><text:span text:style-name="T26"/></text:p>
            <text:p text:style-name="P57" loext:marker-style-name="T26"><text:span text:style-name="T26"><text:s text:c="13"/>/ <text:s text:c="2"/>\</text:span><text:span text:style-name="T26"/></text:p>
            <text:p text:style-name="P57" loext:marker-style-name="T26"><text:span text:style-name="T26"><text:s text:c="12"/>+ <text:s text:c="4"/>*</text:span><text:span text:style-name="T26"/></text:p>
            <text:p text:style-name="P57" loext:marker-style-name="T26"><text:span text:style-name="T26"><text:s text:c="11"/>/ \ <text:s text:c="2"/>/ \</text:span><text:span text:style-name="T26"/></text:p>
            <text:p text:style-name="P57" loext:marker-style-name="T26"><text:span text:style-name="T26"><text:s text:c="10"/>- <text:s text:c="2"/>* A <text:s text:c="2"/>C</text:span><text:span text:style-name="T26"/></text:p>
            <text:p text:style-name="P57" loext:marker-style-name="T26"><text:span text:style-name="T26"><text:s text:c="9"/>/ \ / \</text:span><text:span text:style-name="T26"/></text:p>
            <text:p text:style-name="P57" loext:marker-style-name="T26"><text:span text:style-name="T26"><text:s text:c="8"/>/ <text:s/>C D <text:s text:c="2"/>E</text:span><text:span text:style-name="T26"/></text:p>
            <text:p text:style-name="P57" loext:marker-style-name="T26"><text:span text:style-name="T26"><text:s text:c="7"/>/ \</text:span><text:span text:style-name="T26"/></text:p>
            <text:p text:style-name="P58" loext:marker-style-name="T26"><text:span text:style-name="T26"><text:s text:c="6"/>A <text:s text:c="2"/>B</text:span><text:span text:style-name="T26"/></text:p>
          </table:table-cell>
        </table:table-row>
      </table:table>
      <text:p text:style-name="P10"/>
      <text:p text:style-name="P55" loext:marker-style-name="T125"><text:span text:style-name="T128">112</text:span><text:span text:style-name="T124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39">前序 </text:span><text:span text:style-name="T143">(Preorder)</text:span><text:span text:style-name="T139">：</text:span><text:span text:style-name="T25"> <text:s/>-+-/ABC×DE×AC</text:span></text:p>
            <text:p text:style-name="P5"><text:soft-page-break/><text:span text:style-name="T33">後序 </text:span><text:span text:style-name="T45">(Postorder)</text:span><text:span text:style-name="T33">：</text:span><text:span text:style-name="T25"> <text:s/>AB/C-DE×+AC×-</text:span></text:p>
            <text:p text:style-name="P9"><text:span text:style-name="T118">中序 </text:span><text:span text:style-name="T115">(Inorder)</text:span><text:span text:style-name="T118">：</text:span><text:span text:style-name="T25"> <text:s/>A/B-C+D×E-A×C <text:s/>（還原為原始算式）</text:span></text:p>
            <text:p text:style-name="P54" loext:marker-style-name="T57"><text:span text:style-name="T76">★ </text:span><text:span text:style-name="T56">圖片原始標示：前序 </text:span><text:span text:style-name="T76">+-/ABC*DE*AC</text:span><text:span text:style-name="T56">，後序 </text:span><text:span text:style-name="T76">AB/C-DE*+AC*-</text:span><text:span text:style-name="T56">（與上方一致，</text:span><text:span text:style-name="T76">× </text:span><text:span text:style-name="T56">以 </text:span><text:span text:style-name="T76">* </text:span><text:span text:style-name="T56">符號表示）</text:span></text:p>
          </table:table-cell>
        </table:table-row>
      </table:table>
      <text:p text:style-name="Standard"/>
      <text:h text:style-name="P36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48" loext:marker-style-name="T49"><text:span text:style-name="T66">Postfix</text:span><text:span text:style-name="T48">（後置式）最大的優點：</text:span><text:span text:style-name="T50">不需要括號</text:span><text:span text:style-name="T48">，</text:span><text:span text:style-name="T51">不需要考慮優先權</text:span><text:span text:style-name="T48">，</text:span><text:span text:style-name="T105">只要用 </text:span><text:span text:style-name="T97">Stack </text:span><text:span text:style-name="T105">就能計算</text:span><text:span text:style-name="T48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8">Postfix Stack </text:span><text:span text:style-name="T20">計算規則</text:span></text:p>
            <text:p text:style-name="P5" loext:marker-style-name="T49"><text:span text:style-name="T66">① </text:span><text:span text:style-name="T50">從左往右讀取每個符號</text:span></text:p>
            <text:p text:style-name="P59" loext:marker-style-name="T49"><text:span text:style-name="T66">② </text:span><text:span text:style-name="T51">看到 運算元（數字</text:span><text:span text:style-name="T67">/</text:span><text:span text:style-name="T51">變數）</text:span><text:span text:style-name="T48">→ </text:span><text:span text:style-name="T106">直接 </text:span><text:span text:style-name="T98">Push </text:span><text:span text:style-name="T106">進 </text:span><text:span text:style-name="T98">Stack</text:span></text:p>
            <text:p text:style-name="P60" loext:marker-style-name="T49"><text:span text:style-name="T66">③ </text:span><text:span text:style-name="T52">看到 運算子（</text:span><text:span text:style-name="T68">+</text:span><text:span text:style-name="T52">、</text:span><text:span text:style-name="T68">-</text:span><text:span text:style-name="T52">、</text:span><text:span text:style-name="T68">×</text:span><text:span text:style-name="T52">、</text:span><text:span text:style-name="T68">÷</text:span><text:span text:style-name="T52">）</text:span><text:span text:style-name="T48">→ </text:span><text:span text:style-name="T88">Pop </text:span><text:span text:style-name="T83">兩個值計算，結果 </text:span><text:span text:style-name="T88">Push </text:span><text:span text:style-name="T83">回 </text:span><text:span text:style-name="T88">Stack</text:span></text:p>
            <text:p text:style-name="P54" loext:marker-style-name="T171"><text:span text:style-name="T173">⚠️ </text:span><text:span text:style-name="T155">重要：</text:span><text:span text:style-name="T157">Pop </text:span><text:span text:style-name="T155">順序是「先 </text:span><text:span text:style-name="T157">Pop </text:span><text:span text:style-name="T155">的是右運算元，後 </text:span><text:span text:style-name="T157">Pop </text:span><text:span text:style-name="T155">的是左運算元」</text:span></text:p>
            <text:p text:style-name="P61" loext:marker-style-name="T57"><text:span text:style-name="T56">例：</text:span><text:span text:style-name="T186">Stack </text:span><text:span text:style-name="T187">由上到下為 </text:span><text:span text:style-name="T186">[5, 2]</text:span><text:span text:style-name="T56">，遇到 </text:span><text:span text:style-name="T76">-</text:span><text:span text:style-name="T56">，計算 </text:span><text:span text:style-name="T76">2 - 5 = -3</text:span><text:span text:style-name="T56">（</text:span><text:span text:style-name="T164">先</text:span><text:span text:style-name="T166">Pop</text:span><text:span text:style-name="T164">的</text:span><text:span text:style-name="T166">5</text:span><text:span text:style-name="T164">是右</text:span><text:span text:style-name="T56">，</text:span><text:span text:style-name="T188">後</text:span><text:span text:style-name="T189">Pop</text:span><text:span text:style-name="T188">的</text:span><text:span text:style-name="T189">2</text:span><text:span text:style-name="T188">是左</text:span><text:span text:style-name="T56">）</text:span></text:p>
          </table:table-cell>
        </table:table-row>
      </table:table>
      <text:p text:style-name="P6"/>
      <text:h text:style-name="P38" text:outline-level="2" loext:marker-style-name="T30"><text:span text:style-name="T30">113</text:span><text:span text:style-name="T29">題實戰：</text:span><text:span text:style-name="T30">36 12 ÷ 10 23 - × 50 40 - +</text:span></text:h>
      <text:p text:style-name="P48" loext:marker-style-name="T34"><text:span text:style-name="T33">答案 </text:span><text:span text:style-name="T45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2"><text:span text:style-name="T79">①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36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Push 36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[36]</text:span><text:span text:style-name="T62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2"><text:span text:style-name="T79">②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12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Push 12 </text:span><text:span text:style-name="T164">先</text:span><text:span text:style-name="T166">Pop</text:span><text:span text:style-name="T164">的是右</text:span><text:span text:style-name="T63"> </text:span></text:p>
          </table:table-cell>
          <table:table-cell table:style-name="表格12.A3" office:value-type="string">
            <text:p text:style-name="Standard" loext:marker-style-name="T62"><text:span text:style-name="T79">[36, 12]</text:span><text:span text:style-name="T62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2"><text:span text:style-name="T79">③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÷</text:span><text:span text:style-name="T62"/></text:p>
          </table:table-cell>
          <table:table-cell table:style-name="表格12.A2" office:value-type="string">
            <text:p text:style-name="Standard" loext:marker-style-name="T62"><text:span text:style-name="T167">Pop 12</text:span><text:span text:style-name="T79">, Pop 36</text:span><text:span text:style-name="T63">，</text:span><text:span text:style-name="T190">計算 </text:span><text:span text:style-name="T191">36÷</text:span><text:span text:style-name="T167">12</text:span><text:span text:style-name="T191">=3</text:span><text:span text:style-name="T190">，</text:span><text:span text:style-name="T191">Push 3</text:span></text:p>
          </table:table-cell>
          <table:table-cell table:style-name="表格12.A2" office:value-type="string">
            <text:p text:style-name="Standard" loext:marker-style-name="T62"><text:span text:style-name="T79">[3]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36÷12=3</text:span><text:span text:style-name="T62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2"><text:span text:style-name="T79">④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10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Push 10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[3, 10]</text:span><text:span text:style-name="T62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2"><text:span text:style-name="T79">⑤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23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Push 23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[3, 10, 23]</text:span><text:span text:style-name="T62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2"><text:span text:style-name="T79">⑥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-</text:span><text:span text:style-name="T62"/></text:p>
          </table:table-cell>
          <table:table-cell table:style-name="表格12.A3" office:value-type="string">
            <text:p text:style-name="Standard" loext:marker-style-name="T62"><text:span text:style-name="T167">Pop 23</text:span><text:span text:style-name="T79">, Pop 10</text:span><text:span text:style-name="T63">，計算 </text:span><text:span text:style-name="T79">10-</text:span><text:span text:style-name="T167">23</text:span><text:span text:style-name="T79">=-13</text:span><text:span text:style-name="T63">，</text:span><text:span text:style-name="T79">Push -13</text:span></text:p>
          </table:table-cell>
          <table:table-cell table:style-name="表格12.A3" office:value-type="string">
            <text:p text:style-name="Standard" loext:marker-style-name="T62"><text:span text:style-name="T79">[3, -13]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10-23=-13</text:span><text:span text:style-name="T62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2"><text:span text:style-name="T79">⑦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×</text:span><text:span text:style-name="T62"/></text:p>
          </table:table-cell>
          <table:table-cell table:style-name="表格12.A2" office:value-type="string">
            <text:p text:style-name="Standard" loext:marker-style-name="T62"><text:span text:style-name="T167">Pop -13</text:span><text:span text:style-name="T79">, Pop 3</text:span><text:span text:style-name="T63">，計算 </text:span><text:span text:style-name="T79">3×</text:span><text:span text:style-name="T167">(-13)</text:span><text:span text:style-name="T79">=-39</text:span><text:span text:style-name="T63">，</text:span><text:span text:style-name="T79">Push -39</text:span></text:p>
          </table:table-cell>
          <table:table-cell table:style-name="表格12.A2" office:value-type="string">
            <text:p text:style-name="Standard" loext:marker-style-name="T62"><text:span text:style-name="T79">[-39]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3×(-13)=-39</text:span><text:span text:style-name="T62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2"><text:span text:style-name="T79">⑧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50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Push 50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[-39, 50]</text:span><text:span text:style-name="T62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2"><text:span text:style-name="T79">⑨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40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Push 40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[-39, 50, 40]</text:span><text:span text:style-name="T62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2"><text:span text:style-name="T79">⑩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-</text:span><text:span text:style-name="T62"/></text:p>
          </table:table-cell>
          <table:table-cell table:style-name="表格12.A3" office:value-type="string">
            <text:p text:style-name="Standard" loext:marker-style-name="T62"><text:span text:style-name="T167">Pop 40</text:span><text:span text:style-name="T79">, Pop 50</text:span><text:span text:style-name="T63">，計算 </text:span><text:span text:style-name="T79">50-</text:span><text:span text:style-name="T167">40</text:span><text:span text:style-name="T79">=10</text:span><text:span text:style-name="T63">，</text:span><text:span text:style-name="T79">Push 10</text:span></text:p>
          </table:table-cell>
          <table:table-cell table:style-name="表格12.A3" office:value-type="string">
            <text:p text:style-name="Standard" loext:marker-style-name="T62"><text:span text:style-name="T79">[-39, 10]</text:span><text:span text:style-name="T62"/></text:p>
          </table:table-cell>
          <table:table-cell table:style-name="表格12.A3" office:value-type="string">
            <text:p text:style-name="Standard" loext:marker-style-name="T62"><text:span text:style-name="T79">50-40=10</text:span><text:span text:style-name="T62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2"><text:span text:style-name="T79">⑪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+</text:span><text:span text:style-name="T62"/></text:p>
          </table:table-cell>
          <table:table-cell table:style-name="表格12.A2" office:value-type="string">
            <text:p text:style-name="Standard" loext:marker-style-name="T62"><text:span text:style-name="T167">Pop 10</text:span><text:span text:style-name="T79">, Pop -39</text:span><text:span text:style-name="T63">，計算 </text:span><text:span text:style-name="T79">-39+</text:span><text:span text:style-name="T167">10</text:span><text:span text:style-name="T79">=-29</text:span><text:span text:style-name="T63">，</text:span><text:span text:style-name="T79">Push -29</text:span></text:p>
          </table:table-cell>
          <table:table-cell table:style-name="表格12.A2" office:value-type="string">
            <text:p text:style-name="Standard" loext:marker-style-name="T62"><text:span text:style-name="T79">[-29]</text:span><text:span text:style-name="T62"/></text:p>
          </table:table-cell>
          <table:table-cell table:style-name="表格12.A2" office:value-type="string">
            <text:p text:style-name="Standard" loext:marker-style-name="T62"><text:span text:style-name="T79">-39+10=-29</text:span><text:span text:style-name="T62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42"><text:span text:style-name="T141">結果</text:span><text:span text:style-name="T142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42"><text:span text:style-name="T147">Stack </text:span><text:span text:style-name="T141">剩下 </text:span><text:span text:style-name="T147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42"><text:span text:style-name="T147">★ </text:span><text:span text:style-name="T141">答案 </text:span><text:span text:style-name="T147">= -29</text:span></text:p>
          </table:table-cell>
        </table:table-row>
      </table:table>
      <text:p text:style-name="P6"/>
      <text:h text:style-name="P38" text:outline-level="2" loext:marker-style-name="T30"><text:span text:style-name="T30">114</text:span><text:span text:style-name="T29">題實戰：</text:span><text:span text:style-name="T30">2 5 × 4 2 + - 6 +</text:span></text:h>
      <text:p text:style-name="P48" loext:marker-style-name="T34"><text:span text:style-name="T33">答案 </text:span><text:span text:style-name="T45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2"><text:span text:style-name="T79">①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2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Push 2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[2]</text:span><text:span text:style-name="T62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2"><text:span text:style-name="T79">②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5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Push 5 <text:s/></text:span><text:span text:style-name="T85">先</text:span><text:span text:style-name="T90">Pop</text:span><text:span text:style-name="T85">的是右</text:span></text:p>
          </table:table-cell>
          <table:table-cell table:style-name="表格13.A3" office:value-type="string">
            <text:p text:style-name="Standard" loext:marker-style-name="T62"><text:span text:style-name="T79">[2, 5]</text:span><text:span text:style-name="T62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2"><text:span text:style-name="T79">③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×</text:span><text:span text:style-name="T62"/></text:p>
          </table:table-cell>
          <table:table-cell table:style-name="表格13.A2" office:value-type="string">
            <text:p text:style-name="Standard" loext:marker-style-name="T62"><text:span text:style-name="T93">Pop 5</text:span><text:span text:style-name="T79">, Pop 2</text:span><text:span text:style-name="T63">，計算 </text:span><text:span text:style-name="T79">2×</text:span><text:span text:style-name="T93">5</text:span><text:span text:style-name="T79">=10</text:span><text:span text:style-name="T63">，</text:span><text:span text:style-name="T79">Push 10</text:span></text:p>
          </table:table-cell>
          <table:table-cell table:style-name="表格13.A2" office:value-type="string">
            <text:p text:style-name="Standard" loext:marker-style-name="T62"><text:span text:style-name="T79">[10]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2×5=10</text:span><text:span text:style-name="T62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2"><text:span text:style-name="T79">④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4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Push 4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[10, 4]</text:span><text:span text:style-name="T62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2"><text:span text:style-name="T79">⑤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2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Push 2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[10, 4, 2]</text:span><text:span text:style-name="T62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2"><text:span text:style-name="T79">⑥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+</text:span><text:span text:style-name="T62"/></text:p>
          </table:table-cell>
          <table:table-cell table:style-name="表格13.A3" office:value-type="string">
            <text:p text:style-name="Standard" loext:marker-style-name="T62"><text:span text:style-name="T93">Pop 2</text:span><text:span text:style-name="T79">, Pop 4</text:span><text:span text:style-name="T63">，計算 </text:span><text:span text:style-name="T79">4+</text:span><text:span text:style-name="T93">2</text:span><text:span text:style-name="T79">=6</text:span><text:span text:style-name="T63">，</text:span><text:span text:style-name="T79">Push 6</text:span></text:p>
          </table:table-cell>
          <table:table-cell table:style-name="表格13.A3" office:value-type="string">
            <text:p text:style-name="Standard" loext:marker-style-name="T62"><text:span text:style-name="T79">[10, 6]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4+2=6</text:span><text:span text:style-name="T62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2"><text:span text:style-name="T79">⑦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-</text:span><text:span text:style-name="T62"/></text:p>
          </table:table-cell>
          <table:table-cell table:style-name="表格13.A2" office:value-type="string">
            <text:p text:style-name="Standard" loext:marker-style-name="T62"><text:span text:style-name="T93">Pop 6</text:span><text:span text:style-name="T79">, Pop 10</text:span><text:span text:style-name="T63">，計算 </text:span><text:span text:style-name="T79">10-</text:span><text:span text:style-name="T93">6</text:span><text:span text:style-name="T79">=4</text:span><text:span text:style-name="T63">，</text:span><text:span text:style-name="T79">Push 4</text:span></text:p>
          </table:table-cell>
          <table:table-cell table:style-name="表格13.A2" office:value-type="string">
            <text:p text:style-name="Standard" loext:marker-style-name="T62"><text:span text:style-name="T79">[4]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10-6=4</text:span><text:span text:style-name="T62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2"><text:span text:style-name="T79">⑧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6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Push 6</text:span><text:span text:style-name="T62"/></text:p>
          </table:table-cell>
          <table:table-cell table:style-name="表格13.A3" office:value-type="string">
            <text:p text:style-name="Standard" loext:marker-style-name="T62"><text:span text:style-name="T79">[4, 6]</text:span><text:span text:style-name="T62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2"><text:span text:style-name="T79">⑨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+</text:span><text:span text:style-name="T62"/></text:p>
          </table:table-cell>
          <table:table-cell table:style-name="表格13.A2" office:value-type="string">
            <text:p text:style-name="Standard" loext:marker-style-name="T62"><text:span text:style-name="T93">Pop</text:span><text:span text:style-name="T79"> 6, Pop 4</text:span><text:span text:style-name="T63">，計算 </text:span><text:span text:style-name="T79">4+</text:span><text:span text:style-name="T93">6</text:span><text:span text:style-name="T79">=10</text:span><text:span text:style-name="T63">，</text:span><text:span text:style-name="T79">Push 10</text:span></text:p>
          </table:table-cell>
          <table:table-cell table:style-name="表格13.A2" office:value-type="string">
            <text:p text:style-name="Standard" loext:marker-style-name="T62"><text:span text:style-name="T79">[10]</text:span><text:span text:style-name="T62"/></text:p>
          </table:table-cell>
          <table:table-cell table:style-name="表格13.A2" office:value-type="string">
            <text:p text:style-name="Standard" loext:marker-style-name="T62"><text:span text:style-name="T79">4+6=10</text:span><text:span text:style-name="T62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42"><text:span text:style-name="T141">結果</text:span><text:span text:style-name="T142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42"><text:span text:style-name="T147">Stack </text:span><text:span text:style-name="T141">剩下 </text:span><text:span text:style-name="T147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42"><text:span text:style-name="T147">★ </text:span><text:span text:style-name="T141">答案 </text:span><text:span text:style-name="T147">= 10</text:span></text:p>
          </table:table-cell>
        </table:table-row>
      </table:table>
      <text:p text:style-name="Standard"/>
      <text:h text:style-name="P36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38" text:outline-level="2" loext:marker-style-name="T30"><text:span text:style-name="T29">建樹（一步一步拆解）</text:span><text:span text:style-name="T30"/></text:h>
      <text:p text:style-name="P4"><text:span text:style-name="T33">步驟 </text:span><text:span text:style-name="T45">1</text:span><text:span text:style-name="T33">：</text:span><text:span text:style-name="T50">最外層最後算</text:span><text:span text:style-name="T48">：</text:span><text:span text:style-name="T67">× <text:s/>→ <text:s/></text:span><text:span text:style-name="T51">根節點 </text:span><text:span text:style-name="T67">= ×</text:span></text:p>
      <text:p text:style-name="P4"><text:span text:style-name="T33">步驟 </text:span><text:span text:style-name="T45">2</text:span><text:span text:style-name="T33">：</text:span><text:span text:style-name="T48">左子樹：</text:span><text:span text:style-name="T66">((6×(5-3))-(1+2))</text:span><text:span text:style-name="T48">，</text:span><text:span text:style-name="T50">最後算 </text:span><text:span text:style-name="T69">-</text:span></text:p>
      <text:p text:style-name="P4"><text:span text:style-name="T33">步驟 </text:span><text:span text:style-name="T45">3</text:span><text:span text:style-name="T33">：</text:span><text:span text:style-name="T48">左子樹左邊：</text:span><text:span text:style-name="T66">6×(5-3)</text:span><text:span text:style-name="T48">，</text:span><text:span text:style-name="T50">最後算 </text:span><text:span text:style-name="T69">×</text:span></text:p>
      <text:p text:style-name="P4"><text:span text:style-name="T33">步驟 </text:span><text:span text:style-name="T45">4</text:span><text:span text:style-name="T33">：</text:span><text:span text:style-name="T48">再拆：</text:span><text:span text:style-name="T66">5-3 </text:span><text:span text:style-name="T50">最後算 </text:span><text:span text:style-name="T69">-</text:span><text:span text:style-name="T48">，葉節點 </text:span><text:span text:style-name="T66">5 </text:span><text:span text:style-name="T48">和 </text:span><text:span text:style-name="T66">3</text:span></text:p>
      <text:p text:style-name="P4"><text:span text:style-name="T33">步驟 </text:span><text:span text:style-name="T45">5</text:span><text:span text:style-name="T33">：</text:span><text:span text:style-name="T48">左子樹右邊：</text:span><text:span text:style-name="T66">1+2</text:span><text:span text:style-name="T48">，葉節點 </text:span><text:span text:style-name="T66">1 </text:span><text:span text:style-name="T48">和 </text:span><text:span text:style-name="T66">2</text:span></text:p>
      <text:p text:style-name="P4"><text:span text:style-name="T33">步驟 </text:span><text:span text:style-name="T45">6</text:span><text:span text:style-name="T33">：</text:span><text:span text:style-name="T48">右子樹：</text:span><text:span text:style-name="T66">((4+2)÷3)+(5×4)</text:span><text:span text:style-name="T48">，</text:span><text:span text:style-name="T50">最後算 </text:span><text:span text:style-name="T69">+</text:span></text:p>
      <text:p text:style-name="P4"><text:span text:style-name="T33">步驟 </text:span><text:span text:style-name="T45">7</text:span><text:span text:style-name="T33">：</text:span><text:span text:style-name="T48">右子樹左邊：</text:span><text:span text:style-name="T66">(4+2)÷3</text:span><text:span text:style-name="T48">，</text:span><text:span text:style-name="T50">最後算 </text:span><text:span text:style-name="T69">÷</text:span></text:p>
      <text:p text:style-name="P4"><text:span text:style-name="T33">步驟 </text:span><text:span text:style-name="T45">8</text:span><text:span text:style-name="T33">：</text:span><text:span text:style-name="T48">再拆：</text:span><text:span text:style-name="T66">4+2</text:span><text:span text:style-name="T48">，葉節點 </text:span><text:span text:style-name="T66">4 </text:span><text:span text:style-name="T48">和 </text:span><text:span text:style-name="T66">2</text:span></text:p>
      <text:p text:style-name="P4"><text:span text:style-name="T33">步驟 </text:span><text:span text:style-name="T45">9</text:span><text:span text:style-name="T33">：</text:span><text:span text:style-name="T48">右子樹右邊：</text:span><text:span text:style-name="T66">5×4</text:span><text:span text:style-name="T48">，葉節點 </text:span><text:span text:style-name="T66">5 </text:span><text:span text:style-name="T48">和 </text:span><text:span text:style-name="T66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5" loext:marker-style-name="T34"><text:span text:style-name="T33">完整表達式樹</text:span><text:span text:style-name="T34"/></text:p>
            <text:p text:style-name="P62" loext:marker-style-name="T27"><text:span text:style-name="T27"><text:s text:c="19"/>* <text:s text:c="30"/>&lt;- 根節點</text:span><text:span text:style-name="T27"/></text:p>
            <text:p text:style-name="P57" loext:marker-style-name="T27"><text:span text:style-name="T27"><text:s text:c="17"/>/ <text:s text:c="2"/>\</text:span><text:span text:style-name="T27"/></text:p>
            <text:p text:style-name="P57" loext:marker-style-name="T27"><text:span text:style-name="T27"><text:s text:c="10"/>- <text:s text:c="16"/>+</text:span><text:span text:style-name="T27"/></text:p>
            <text:p text:style-name="P57" loext:marker-style-name="T27"><text:span text:style-name="T27"><text:s text:c="8"/>/ <text:s text:c="2"/>\ <text:s text:c="12"/>/ <text:s text:c="2"/>\</text:span><text:span text:style-name="T27"/></text:p>
            <text:p text:style-name="P57" loext:marker-style-name="T27"><text:span text:style-name="T27"><text:s text:c="5"/>* <text:s text:c="8"/>+ <text:s text:c="6"/>/ <text:s text:c="8"/>*</text:span><text:span text:style-name="T27"/></text:p>
            <text:p text:style-name="P57" loext:marker-style-name="T27"><text:span text:style-name="T27"><text:s text:c="3"/>/ <text:s text:c="2"/>\ <text:s text:c="4"/>/ <text:s text:c="2"/>\ <text:s text:c="2"/>/ <text:s text:c="2"/>\ <text:s text:c="4"/>/ <text:s text:c="2"/>\</text:span><text:span text:style-name="T27"/></text:p>
            <text:p text:style-name="P58" loext:marker-style-name="T27"><text:span text:style-name="T27"><text:s text:c="2"/>6 <text:s text:c="4"/>- <text:s text:c="2"/>1 <text:s text:c="4"/>2 + <text:s text:c="4"/>3 <text:s text:c="2"/>5 <text:s text:c="4"/>4</text:span><text:span text:style-name="T27"/></text:p>
            <text:p text:style-name="P58" loext:marker-style-name="T27"><text:span text:style-name="T27"><text:s text:c="6"/>/ <text:s text:c="2"/>\ <text:s text:c="6"/>/ <text:s text:c="2"/>\</text:span><text:span text:style-name="T27"/></text:p>
            <text:p text:style-name="P58" loext:marker-style-name="T27"><text:span text:style-name="T27"><text:s text:c="5"/>5 <text:s text:c="4"/>3 <text:s text:c="4"/>4 <text:s text:c="4"/>2</text:span><text:span text:style-name="T27"/></text:p>
          </table:table-cell>
        </table:table-row>
      </table:table>
      <text:p text:style-name="P10"/>
      <text:h text:style-name="P38" text:outline-level="2" loext:marker-style-name="T30"><text:span text:style-name="T30">Postorder </text:span><text:span text:style-name="T29">求值（</text:span><text:span text:style-name="T30">Bottom-Up</text:span><text:span text:style-name="T29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5"><text:span text:style-name="T75">①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5-3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= 2</text:span><text:span text:style-name="T55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5"><text:span text:style-name="T75">②</text:span><text:span text:style-name="T55"/></text:p>
          </table:table-cell>
          <table:table-cell table:style-name="表格16.A3" office:value-type="string">
            <text:p text:style-name="Standard" loext:marker-style-name="T55"><text:span text:style-name="T75">6×2</text:span><text:span text:style-name="T55"/></text:p>
          </table:table-cell>
          <table:table-cell table:style-name="表格16.A3" office:value-type="string">
            <text:p text:style-name="Standard" loext:marker-style-name="T55"><text:span text:style-name="T75">= 12</text:span><text:span text:style-name="T55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5"><text:span text:style-name="T75">③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1+2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= 3</text:span><text:span text:style-name="T55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5"><text:span text:style-name="T75">④</text:span><text:span text:style-name="T55"/></text:p>
          </table:table-cell>
          <table:table-cell table:style-name="表格16.A3" office:value-type="string">
            <text:p text:style-name="Standard" loext:marker-style-name="T55"><text:span text:style-name="T75">12-3</text:span><text:span text:style-name="T54">（左子樹完成）</text:span></text:p>
          </table:table-cell>
          <table:table-cell table:style-name="表格16.A3" office:value-type="string">
            <text:p text:style-name="Standard" loext:marker-style-name="T58"><text:span text:style-name="T77">= 9</text:span><text:span text:style-name="T58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5"><text:span text:style-name="T75">⑤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4+2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= 6</text:span><text:span text:style-name="T55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5"><text:span text:style-name="T75">⑥</text:span><text:span text:style-name="T55"/></text:p>
          </table:table-cell>
          <table:table-cell table:style-name="表格16.A3" office:value-type="string">
            <text:p text:style-name="Standard" loext:marker-style-name="T55"><text:span text:style-name="T75">6÷3</text:span><text:span text:style-name="T55"/></text:p>
          </table:table-cell>
          <table:table-cell table:style-name="表格16.A3" office:value-type="string">
            <text:p text:style-name="Standard" loext:marker-style-name="T55"><text:span text:style-name="T75">= 2</text:span><text:span text:style-name="T55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5"><text:span text:style-name="T75">⑦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5×4</text:span><text:span text:style-name="T55"/></text:p>
          </table:table-cell>
          <table:table-cell table:style-name="表格16.A2" office:value-type="string">
            <text:p text:style-name="Standard" loext:marker-style-name="T55"><text:span text:style-name="T75">= 20</text:span><text:span text:style-name="T55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5"><text:span text:style-name="T75">⑧</text:span><text:span text:style-name="T55"/></text:p>
          </table:table-cell>
          <table:table-cell table:style-name="表格16.A3" office:value-type="string">
            <text:p text:style-name="Standard" loext:marker-style-name="T55"><text:span text:style-name="T75">2+20</text:span><text:span text:style-name="T54">（右子樹完成）</text:span></text:p>
          </table:table-cell>
          <table:table-cell table:style-name="表格16.A3" office:value-type="string">
            <text:p text:style-name="Standard" loext:marker-style-name="T58"><text:span text:style-name="T77">= 22</text:span><text:span text:style-name="T58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22"><text:span text:style-name="T127">⑨</text:span><text:span text:style-name="T122"/></text:p>
          </table:table-cell>
          <table:table-cell table:style-name="表格16.A10" office:value-type="string">
            <text:p text:style-name="Standard" loext:marker-style-name="T122"><text:span text:style-name="T127">9×22</text:span><text:span text:style-name="T123">（根節點）</text:span></text:p>
          </table:table-cell>
          <table:table-cell table:style-name="表格16.A10" office:value-type="string">
            <text:p text:style-name="Standard" loext:marker-style-name="T122"><text:span text:style-name="T127">= 198 ★</text:span><text:span text:style-name="T122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8">Postorder</text:span><text:span text:style-name="T20">？這個範例完美說明了一條鏈：</text:span></text:p>
            <text:p text:style-name="P46" loext:marker-style-name="T34"><text:span text:style-name="T45">Expression Tree <text:s/>→ <text:s/>Postorder </text:span><text:span text:style-name="T33">走訪 <text:s/>→ <text:s/></text:span><text:span text:style-name="T45">Postfix </text:span><text:span text:style-name="T33">算式 <text:s/>→ <text:s/></text:span><text:span text:style-name="T45">Stack </text:span><text:span text:style-name="T33">求值 <text:s/>→ <text:s/>答案 </text:span><text:span text:style-name="T45">198</text:span></text:p>
          </table:table-cell>
        </table:table-row>
      </table:table>
      <text:p text:style-name="Standard"/>
      <text:h text:style-name="P36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48" loext:marker-style-name="T49"><text:span text:style-name="T48">這是資訊類考試最常考的題型之一，必須熟練。</text:span><text:span text:style-name="T49"/></text:p>
      <text:p text:style-name="P8"/>
      <text:h text:style-name="P38" text:outline-level="2" loext:marker-style-name="T30"><text:span text:style-name="T29">優先權表（考前必背）</text:span><text:span text:style-name="T30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8"><text:span text:style-name="T77">× <text:s/>÷</text:span><text:span text:style-name="T59">（乘、除）</text:span></text:p>
          </table:table-cell>
          <table:table-cell table:style-name="表格18.A2" office:value-type="string">
            <text:p text:style-name="Standard" loext:marker-style-name="T104"><text:span text:style-name="T103">優先權 </text:span><text:span text:style-name="T100">2</text:span><text:span text:style-name="T103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61"><text:span text:style-name="T78">+ -</text:span><text:span text:style-name="T60">（加、減）</text:span></text:p>
          </table:table-cell>
          <table:table-cell table:style-name="表格18.A3" office:value-type="string">
            <text:p text:style-name="Standard" loext:marker-style-name="T165"><text:span text:style-name="T164">優先權 </text:span><text:span text:style-name="T166">1</text:span><text:span text:style-name="T164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6"><text:span text:style-name="T85">（ <text:s/>）（括號）</text:span><text:span text:style-name="T86"/></text:p>
          </table:table-cell>
          <table:table-cell table:style-name="表格18.A2" office:value-type="string">
            <text:p text:style-name="Standard" loext:marker-style-name="T86"><text:span text:style-name="T85">特殊處理（見規則）</text:span><text:span text:style-name="T86"/></text:p>
          </table:table-cell>
        </table:table-row>
      </table:table>
      <text:p text:style-name="P10"/>
      <text:h text:style-name="P38" text:outline-level="2" loext:marker-style-name="T30"><text:span text:style-name="T29">演算法步驟（</text:span><text:span text:style-name="T30">5</text:span><text:span text:style-name="T29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9"><text:span text:style-name="T48">規則 </text:span><text:span text:style-name="T66">1</text:span><text:span text:style-name="T48">：</text:span><text:span text:style-name="T50">遇到 運算元（</text:span><text:span text:style-name="T69">A</text:span><text:span text:style-name="T50">、</text:span><text:span text:style-name="T69">B</text:span><text:span text:style-name="T50">、</text:span><text:span text:style-name="T69">1</text:span><text:span text:style-name="T50">、</text:span><text:span text:style-name="T69">2 </text:span><text:span text:style-name="T50">等）</text:span><text:span text:style-name="T48">→ </text:span><text:span text:style-name="T178">直接輸出到結果</text:span></text:p>
            <text:p text:style-name="P61" loext:marker-style-name="T49"><text:span text:style-name="T48">規則 </text:span><text:span text:style-name="T66">2</text:span><text:span text:style-name="T48">：</text:span><text:span text:style-name="T84">遇到 左括號 </text:span><text:span text:style-name="T89">(</text:span><text:span text:style-name="T66"> → </text:span><text:span text:style-name="T48">直接 </text:span><text:span text:style-name="T66">Push </text:span><text:span text:style-name="T48">進 </text:span><text:span text:style-name="T66">Stack</text:span></text:p>
            <text:p text:style-name="P61" loext:marker-style-name="T49"><text:span text:style-name="T48">規則 </text:span><text:span text:style-name="T66">3</text:span><text:span text:style-name="T48">：</text:span><text:span text:style-name="T192">遇到 右括號 </text:span><text:span text:style-name="T194">)</text:span><text:span text:style-name="T66"> → </text:span><text:span text:style-name="T105">持續 </text:span><text:span text:style-name="T97">Pop </text:span><text:span text:style-name="T105">並輸出</text:span><text:span text:style-name="T48">，</text:span><text:span text:style-name="T196">直到遇見左括號 </text:span><text:span text:style-name="T197">( </text:span><text:span text:style-name="T196">為止</text:span><text:span text:style-name="T48">（</text:span><text:span text:style-name="T149">括號本身不輸出</text:span><text:span text:style-name="T48">）</text:span></text:p>
            <text:p text:style-name="P61" loext:marker-style-name="T49"><text:span text:style-name="T48">規則 </text:span><text:span text:style-name="T66">4</text:span><text:span text:style-name="T48">：</text:span><text:span text:style-name="T51">遇到 運算子（</text:span><text:span text:style-name="T67">+</text:span><text:span text:style-name="T51">、</text:span><text:span text:style-name="T67">-</text:span><text:span text:style-name="T51">、</text:span><text:span text:style-name="T67">×</text:span><text:span text:style-name="T51">、</text:span><text:span text:style-name="T67">÷</text:span><text:span text:style-name="T51">）</text:span><text:span text:style-name="T48">→ </text:span><text:span text:style-name="T83">若 </text:span><text:span text:style-name="T88">Stack </text:span><text:span text:style-name="T83">頂端運算子優先權 ≥ 目前運算子</text:span><text:span text:style-name="T48">，</text:span><text:span text:style-name="T105">先 </text:span><text:span text:style-name="T97">Pop </text:span><text:span text:style-name="T105">再 </text:span><text:span text:style-name="T97">Push</text:span><text:span text:style-name="T105">；否則直接 </text:span><text:span text:style-name="T97">Push</text:span><text:span text:style-name="T195">(</text:span><text:span text:style-name="T193">當看到新的運算子時：如果 </text:span><text:span text:style-name="T195">Stack </text:span><text:span text:style-name="T193">裡面的運算子比它更早算就：先拿</text:span><text:span text:style-name="T195">Stack </text:span><text:span text:style-name="T193">裡面的運算子來輸出</text:span><text:span text:style-name="T195">)</text:span></text:p>
            <text:p text:style-name="P60" loext:marker-style-name="T49"><text:span text:style-name="T48">規則 </text:span><text:span text:style-name="T66">5</text:span><text:span text:style-name="T48">：</text:span><text:span text:style-name="T50">讀取結束 </text:span><text:span text:style-name="T48">→ </text:span><text:span text:style-name="T178">把 </text:span><text:span text:style-name="T179">Stack </text:span><text:span text:style-name="T178">剩餘的所有運算子全部 </text:span><text:span text:style-name="T179">Pop </text:span><text:span text:style-name="T178">並輸出</text:span></text:p>
          </table:table-cell>
        </table:table-row>
      </table:table>
      <text:p text:style-name="P10"/>
      <text:h text:style-name="P38" text:outline-level="2" loext:marker-style-name="T30"><text:span text:style-name="T30">5 </text:span><text:span text:style-name="T29">道練習題完整解析</text:span></text:h>
      <text:p text:style-name="P55" loext:marker-style-name="T125"><text:span text:style-name="T124">題目 </text:span><text:span text:style-name="T128">1</text:span><text:span text:style-name="T124">：</text:span><text:span text:style-name="T129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0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0.A2" office:value-type="string">
            <text:p text:style-name="Standard" loext:marker-style-name="T72"><text:span text:style-name="T72">（空）</text:span><text:span text:style-name="T72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2"><text:span text:style-name="T72">+</text:span><text:span text:style-name="T72"/></text:p>
          </table:table-cell>
          <table:table-cell table:style-name="表格20.A3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0.A3" office:value-type="string">
            <text:p text:style-name="Standard" loext:marker-style-name="T72"><text:span text:style-name="T72">+</text:span><text:span text:style-name="T72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2"><text:span text:style-name="T72">B</text:span><text:span text:style-name="T72"/></text:p>
          </table:table-cell>
          <table:table-cell table:style-name="表格20.A2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0.A2" office:value-type="string">
            <text:p text:style-name="Standard" loext:marker-style-name="T72"><text:span text:style-name="T72">+</text:span><text:span text:style-name="T72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2"><text:span text:style-name="T72">*</text:span><text:span text:style-name="T72"/></text:p>
          </table:table-cell>
          <table:table-cell table:style-name="表格20.A3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0.A3" office:value-type="string">
            <text:p text:style-name="Standard" loext:marker-style-name="T72"><text:span text:style-name="T73">+ *</text:span><text:span text:style-name="T72"> <text:s text:c="4"/>(</text:span><text:span text:style-name="T92">* &gt; +，直接放入</text:span><text:span text:style-name="T72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2"><text:span text:style-name="T72">C</text:span><text:span text:style-name="T72"/></text:p>
          </table:table-cell>
          <table:table-cell table:style-name="表格20.A2" office:value-type="string">
            <text:p text:style-name="Standard" loext:marker-style-name="T72"><text:span text:style-name="T72">ABC</text:span><text:span text:style-name="T72"/></text:p>
          </table:table-cell>
          <table:table-cell table:style-name="表格20.A2" office:value-type="string">
            <text:p text:style-name="Standard" loext:marker-style-name="T72"><text:span text:style-name="T72">+ *</text:span><text:span text:style-name="T72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2"><text:span text:style-name="T72">結束</text:span><text:span text:style-name="T72"/></text:p>
          </table:table-cell>
          <table:table-cell table:style-name="表格20.A3" office:value-type="string">
            <text:p text:style-name="Standard" loext:marker-style-name="T72"><text:span text:style-name="T72">ABC</text:span><text:span text:style-name="T107">*+</text:span></text:p>
          </table:table-cell>
          <table:table-cell table:style-name="表格20.A3" office:value-type="string">
            <text:p text:style-name="Standard" loext:marker-style-name="T72"><text:span text:style-name="T72">（全部 </text:span><text:span text:style-name="T198">Pop：先 *，再 +</text:span><text:span text:style-name="T72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45"><text:span text:style-name="T145">★ 答案：</text:span><text:span text:style-name="T159">ABC*+</text:span></text:p>
          </table:table-cell>
          <table:covered-table-cell/>
          <table:covered-table-cell/>
        </table:table-row>
      </table:table>
      <text:p text:style-name="P8"/>
      <text:p text:style-name="P55" loext:marker-style-name="T125"><text:span text:style-name="T124">題目 </text:span><text:span text:style-name="T128">2</text:span><text:span text:style-name="T124">：</text:span><text:span text:style-name="T129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2"><text:span text:style-name="T72">(</text:span><text:span text:style-name="T72"/></text:p>
          </table:table-cell>
          <table:table-cell table:style-name="表格21.A2" office:value-type="string">
            <text:p text:style-name="Standard" loext:marker-style-name="T72"><text:span text:style-name="T72">（空）</text:span><text:span text:style-name="T72"/></text:p>
          </table:table-cell>
          <table:table-cell table:style-name="表格21.A2" office:value-type="string">
            <text:p text:style-name="Standard" loext:marker-style-name="T72"><text:span text:style-name="T72">(</text:span><text:span text:style-name="T72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1.A3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1.A3" office:value-type="string">
            <text:p text:style-name="Standard" loext:marker-style-name="T72"><text:span text:style-name="T72">(</text:span><text:span text:style-name="T72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2"><text:span text:style-name="T72">+</text:span><text:span text:style-name="T72"/></text:p>
          </table:table-cell>
          <table:table-cell table:style-name="表格21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1.A2" office:value-type="string">
            <text:p text:style-name="Standard" loext:marker-style-name="T73"><text:span text:style-name="T73">( +</text:span><text:span text:style-name="T73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2"><text:span text:style-name="T72">B</text:span><text:span text:style-name="T72"/></text:p>
          </table:table-cell>
          <table:table-cell table:style-name="表格21.A3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1.A3" office:value-type="string">
            <text:p text:style-name="Standard" loext:marker-style-name="T72"><text:span text:style-name="T72">( +</text:span><text:span text:style-name="T72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2"><text:span text:style-name="T72">)</text:span><text:span text:style-name="T72"/></text:p>
          </table:table-cell>
          <table:table-cell table:style-name="表格21.A2" office:value-type="string">
            <text:p text:style-name="Standard" loext:marker-style-name="T72"><text:span text:style-name="T72">AB</text:span><text:span text:style-name="T74">+</text:span></text:p>
          </table:table-cell>
          <table:table-cell table:style-name="表格21.A2" office:value-type="string">
            <text:p text:style-name="Standard" loext:marker-style-name="T92"><text:span text:style-name="T92">（空） <text:s/>← Pop 到 ( 為止</text:span><text:span text:style-name="T92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2"><text:span text:style-name="T72">*</text:span><text:span text:style-name="T72"/></text:p>
          </table:table-cell>
          <table:table-cell table:style-name="表格21.A3" office:value-type="string">
            <text:p text:style-name="Standard" loext:marker-style-name="T72"><text:span text:style-name="T72">AB</text:span><text:span text:style-name="T74">+</text:span></text:p>
          </table:table-cell>
          <table:table-cell table:style-name="表格21.A3" office:value-type="string">
            <text:p text:style-name="Standard" loext:marker-style-name="T72"><text:span text:style-name="T72">*</text:span><text:span text:style-name="T72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2"><text:span text:style-name="T72">C</text:span><text:span text:style-name="T72"/></text:p>
          </table:table-cell>
          <table:table-cell table:style-name="表格21.A2" office:value-type="string">
            <text:p text:style-name="Standard" loext:marker-style-name="T72"><text:span text:style-name="T72">AB+C</text:span><text:span text:style-name="T72"/></text:p>
          </table:table-cell>
          <table:table-cell table:style-name="表格21.A2" office:value-type="string">
            <text:p text:style-name="Standard" loext:marker-style-name="T72"><text:span text:style-name="T72">*</text:span><text:span text:style-name="T72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2"><text:span text:style-name="T72">結束</text:span><text:span text:style-name="T72"/></text:p>
          </table:table-cell>
          <table:table-cell table:style-name="表格21.A3" office:value-type="string">
            <text:p text:style-name="Standard" loext:marker-style-name="T72"><text:span text:style-name="T72">AB+C*</text:span><text:span text:style-name="T72"/></text:p>
          </table:table-cell>
          <table:table-cell table:style-name="表格21.A3" office:value-type="string">
            <text:p text:style-name="Standard" loext:marker-style-name="T72"><text:span text:style-name="T72">（Pop *）</text:span><text:span text:style-name="T72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45"><text:span text:style-name="T145">★ 答案：AB+C*</text:span><text:span text:style-name="T145"/></text:p>
          </table:table-cell>
          <table:covered-table-cell/>
          <table:covered-table-cell/>
        </table:table-row>
      </table:table>
      <text:p text:style-name="P8"/>
      <text:p text:style-name="P55" loext:marker-style-name="T125"><text:span text:style-name="T124">題目 </text:span><text:span text:style-name="T128">3</text:span><text:span text:style-name="T124">：</text:span><text:span text:style-name="T129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2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2.A2" office:value-type="string">
            <text:p text:style-name="Standard" loext:marker-style-name="T72"><text:span text:style-name="T72">（空）</text:span><text:span text:style-name="T72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2"><text:span text:style-name="T72">+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2">+</text:span><text:span text:style-name="T72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2"><text:span text:style-name="T72">B</text:span><text:span text:style-name="T72"/></text:p>
          </table:table-cell>
          <table:table-cell table:style-name="表格22.A2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2.A2" office:value-type="string">
            <text:p text:style-name="Standard" loext:marker-style-name="T72"><text:span text:style-name="T72">+</text:span><text:span text:style-name="T72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2"><text:span text:style-name="T72">*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3">+ * </text:span><text:span text:style-name="T72"><text:s/>（</text:span><text:span text:style-name="T92">* &gt; +，直接放</text:span><text:span text:style-name="T72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2"><text:span text:style-name="T72">C</text:span><text:span text:style-name="T72"/></text:p>
          </table:table-cell>
          <table:table-cell table:style-name="表格22.A2" office:value-type="string">
            <text:p text:style-name="Standard" loext:marker-style-name="T72"><text:span text:style-name="T72">ABC</text:span><text:span text:style-name="T72"/></text:p>
          </table:table-cell>
          <table:table-cell table:style-name="表格22.A2" office:value-type="string">
            <text:p text:style-name="Standard" loext:marker-style-name="T73"><text:span text:style-name="T73">+ *</text:span><text:span text:style-name="T73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2"><text:span text:style-name="T72">-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2">ABC*+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2">- <text:s/>（</text:span><text:span text:style-name="T182">- ≤ *，先 Pop *</text:span><text:span text:style-name="T72">；</text:span><text:span text:style-name="T108">- ≤ +，再 Pop +</text:span><text:span text:style-name="T72">；</text:span><text:span text:style-name="T199">最後 Push -</text:span><text:span text:style-name="T72">）(</text:span><text:span text:style-name="T107">當看到新的運算子時：如果 Stack 裡面的運算子比它更早算就：先拿出來輸出</text:span><text:span text:style-name="T72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2"><text:span text:style-name="T72">D</text:span><text:span text:style-name="T72"/></text:p>
          </table:table-cell>
          <table:table-cell table:style-name="表格22.A2" office:value-type="string">
            <text:p text:style-name="Standard" loext:marker-style-name="T72"><text:span text:style-name="T72">ABC*+D</text:span><text:span text:style-name="T72"/></text:p>
          </table:table-cell>
          <table:table-cell table:style-name="表格22.A2" office:value-type="string">
            <text:p text:style-name="Standard" loext:marker-style-name="T72"><text:span text:style-name="T72">-</text:span><text:span text:style-name="T72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2"><text:span text:style-name="T72">結束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2">ABC*+D-</text:span><text:span text:style-name="T72"/></text:p>
          </table:table-cell>
          <table:table-cell table:style-name="表格22.A3" office:value-type="string">
            <text:p text:style-name="Standard" loext:marker-style-name="T72"><text:span text:style-name="T72">（Pop -）</text:span><text:span text:style-name="T72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45"><text:span text:style-name="T145">★ 答案：ABC*+D-</text:span><text:span text:style-name="T145"/></text:p>
          </table:table-cell>
          <table:covered-table-cell/>
          <table:covered-table-cell/>
        </table:table-row>
      </table:table>
      <text:p text:style-name="P8"/>
      <text:p text:style-name="P55" loext:marker-style-name="T125"><text:span text:style-name="T124">題目 </text:span><text:span text:style-name="T128">4</text:span><text:span text:style-name="T124">：</text:span><text:span text:style-name="T129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2"><text:span text:style-name="T72">(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（空）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(</text:span><text:span text:style-name="T72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(</text:span><text:span text:style-name="T72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2"><text:span text:style-name="T72">+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( +</text:span><text:span text:style-name="T72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2"><text:span text:style-name="T72">B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( +</text:span><text:span text:style-name="T72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2"><text:span text:style-name="T72">)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AB+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（空）</text:span><text:span text:style-name="T72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2"><text:span text:style-name="T72">*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AB+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*</text:span><text:span text:style-name="T72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2"><text:span text:style-name="T72">(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AB+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* (</text:span><text:span text:style-name="T72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2"><text:span text:style-name="T72">C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AB+C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* (</text:span><text:span text:style-name="T72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2"><text:span text:style-name="T72">-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AB+C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* ( - <text:s/></text:span><text:span text:style-name="T133">注意此處：Stack 頂端根本不是 *</text:span><text:span text:style-name="T200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2"><text:span text:style-name="T72">D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AB+CD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* ( -</text:span><text:span text:style-name="T72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2"><text:span text:style-name="T72">)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2">AB+CD-</text:span><text:span text:style-name="T72"/></text:p>
          </table:table-cell>
          <table:table-cell table:style-name="表格23.A2" office:value-type="string">
            <text:p text:style-name="Standard" loext:marker-style-name="T72"><text:span text:style-name="T74">* </text:span><text:span text:style-name="T72"><text:s text:c="2"/>← </text:span><text:span text:style-name="T201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2"><text:span text:style-name="T72">結束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AB+CD-*</text:span><text:span text:style-name="T72"/></text:p>
          </table:table-cell>
          <table:table-cell table:style-name="表格23.A3" office:value-type="string">
            <text:p text:style-name="Standard" loext:marker-style-name="T72"><text:span text:style-name="T72">（Pop *）</text:span><text:span text:style-name="T72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45"><text:span text:style-name="T145">★ 答案：AB+CD-*</text:span><text:span text:style-name="T145"/></text:p>
          </table:table-cell>
          <table:covered-table-cell/>
          <table:covered-table-cell/>
        </table:table-row>
      </table:table>
      <text:p text:style-name="P8"/>
      <text:p text:style-name="P55" loext:marker-style-name="T125"><text:span text:style-name="T124">題目 </text:span><text:span text:style-name="T128">5</text:span><text:span text:style-name="T124">：</text:span><text:span text:style-name="T129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（空）</text:span><text:span text:style-name="T72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2"><text:span text:style-name="T72">+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A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+</text:span><text:span text:style-name="T72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2"><text:span text:style-name="T72">B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+</text:span><text:span text:style-name="T72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2"><text:span text:style-name="T72">*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+ * <text:s/>（</text:span><text:span text:style-name="T92">* &gt; +，直接放</text:span><text:span text:style-name="T72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2"><text:span text:style-name="T72">(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AB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+ * (</text:span><text:span text:style-name="T72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2"><text:span text:style-name="T72">C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ABC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+ * (</text:span><text:span text:style-name="T72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2"><text:span text:style-name="T72">-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ABC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+ * ( -</text:span><text:span text:style-name="T72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2"><text:span text:style-name="T72">D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ABCD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+ * ( -</text:span><text:span text:style-name="T72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2"><text:span text:style-name="T72">)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ABCD-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+ * <text:s text:c="2"/>←</text:span><text:span text:style-name="T201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2"><text:span text:style-name="T72">/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ABCD-*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讀到 / </text:span><text:span text:style-name="T73">此時 Stack頂端是 *</text:span><text:span text:style-name="T72"><text:line-break/><text:line-break/></text:span><text:span text:style-name="T160">/ 與 * 同優先權 → 先 Pop *</text:span><text:span text:style-name="T72"><text:line-break/><text:line-break/></text:span><text:span text:style-name="T109">此時新的 Stack頂端變成 +</text:span><text:span text:style-name="T72"><text:line-break/><text:line-break/></text:span><text:span text:style-name="T107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2"><text:span text:style-name="T72">E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ABCD-*E</text:span><text:span text:style-name="T72"/></text:p>
          </table:table-cell>
          <table:table-cell table:style-name="表格24.A2" office:value-type="string">
            <text:p text:style-name="Standard" loext:marker-style-name="T72"><text:span text:style-name="T72">+ /</text:span><text:span text:style-name="T72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2"><text:span text:style-name="T72">結束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ABCD-*E/+</text:span><text:span text:style-name="T72"/></text:p>
          </table:table-cell>
          <table:table-cell table:style-name="表格24.A3" office:value-type="string">
            <text:p text:style-name="Standard" loext:marker-style-name="T72"><text:span text:style-name="T72">（Pop /，再 Pop +）</text:span><text:span text:style-name="T72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45"><text:span text:style-name="T145">★ 答案：ABCD-*E/+</text:span><text:span text:style-name="T145"/></text:p>
          </table:table-cell>
          <table:covered-table-cell/>
          <table:covered-table-cell/>
        </table:table-row>
      </table:table>
      <text:p text:style-name="P10"/>
      <text:h text:style-name="P38" text:outline-level="2" loext:marker-style-name="T30"><text:span text:style-name="T29">常見陷阱：</text:span><text:span text:style-name="T3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62" loext:marker-style-name="T174"><text:span text:style-name="T174">❌ 錯誤答案：ABC+-</text:span><text:span text:style-name="T174"/></text:p>
            <text:p text:style-name="P61" loext:marker-style-name="T144"><text:span text:style-name="T144">✅ </text:span><text:span text:style-name="T146">正確答案：AB-C+</text:span></text:p>
            <text:p text:style-name="P9" loext:marker-style-name="T49"><text:span text:style-name="T48">原因：</text:span><text:span text:style-name="T66">+ </text:span><text:span text:style-name="T48">和 </text:span><text:span text:style-name="T66">- </text:span><text:span text:style-name="T48">優先權相同，採左結合，計算順序為 </text:span><text:span text:style-name="T66">(A-B)+C</text:span><text:span text:style-name="T48">。 </text:span><text:span text:style-name="T83">遇到 </text:span><text:span text:style-name="T88">+ </text:span><text:span text:style-name="T83">時，</text:span><text:span text:style-name="T88">Stack </text:span><text:span text:style-name="T83">頂端是 </text:span><text:span text:style-name="T88">-</text:span><text:span text:style-name="T83">，兩者優先權相同</text:span><text:span text:style-name="T48">，</text:span><text:span text:style-name="T196">必須先 </text:span><text:span text:style-name="T197">Pop -</text:span><text:span text:style-name="T196">，再 </text:span><text:span text:style-name="T197">Push +</text:span><text:span text:style-name="T48">。</text:span></text:p>
          </table:table-cell>
        </table:table-row>
      </table:table>
      <text:p text:style-name="Standard"/>
      <text:h text:style-name="P36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38" text:outline-level="2" loext:marker-style-name="T30"><text:span text:style-name="T30">Prefix Stack </text:span><text:span text:style-name="T29">求值</text:span></text:h>
      <text:p text:style-name="P48" loext:marker-style-name="T49"><text:span text:style-name="T158">Prefix</text:span><text:span text:style-name="T156">（前置式）與 </text:span><text:span text:style-name="T158">Postfix </text:span><text:span text:style-name="T156">的差別在於讀取方向</text:span><text:span text:style-name="T48">：</text:span><text:span text:style-name="T134">Postfix </text:span><text:span text:style-name="T132">從左往右，</text:span><text:span text:style-name="T134">Prefix </text:span><text:span text:style-name="T132">從右往左</text:span><text:span text:style-name="T48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8">Prefix Stack </text:span><text:span text:style-name="T20">計算規則</text:span></text:p>
            <text:p text:style-name="P62" loext:marker-style-name="T49"><text:span text:style-name="T66">① </text:span><text:span text:style-name="T105">從右往左讀取每個符號</text:span></text:p>
            <text:p text:style-name="P59" loext:marker-style-name="T49"><text:span text:style-name="T66">② </text:span><text:span text:style-name="T50">看到 運算元 </text:span><text:span text:style-name="T48">→ </text:span><text:span text:style-name="T98">Push </text:span><text:span text:style-name="T106">進 </text:span><text:span text:style-name="T98">Stack</text:span></text:p>
            <text:p text:style-name="P60" loext:marker-style-name="T49"><text:span text:style-name="T66">③ </text:span><text:span text:style-name="T53">看到 運算子</text:span><text:span text:style-name="T48"> → </text:span><text:span text:style-name="T88">Pop </text:span><text:span text:style-name="T83">兩個值，計算（先 </text:span><text:span text:style-name="T88">Pop </text:span><text:span text:style-name="T83">的是左邊，後 </text:span><text:span text:style-name="T88">Pop </text:span><text:span text:style-name="T83">的是右邊）</text:span><text:span text:style-name="T48">，</text:span><text:span text:style-name="T66">Push </text:span><text:span text:style-name="T48">結果</text:span></text:p>
            <text:p text:style-name="P54" loext:marker-style-name="T204"><text:span text:style-name="T202">⚠️ </text:span><text:span text:style-name="T203">注意：</text:span><text:span text:style-name="T202">Prefix </text:span><text:span text:style-name="T203">的 </text:span><text:span text:style-name="T202">Pop </text:span><text:span text:style-name="T203">順序與 </text:span><text:span text:style-name="T202">Postfix </text:span><text:span text:style-name="T203">相反！</text:span></text:p>
          </table:table-cell>
        </table:table-row>
      </table:table>
      <text:p text:style-name="P8"/>
      <text:p text:style-name="P48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2"><text:span text:style-name="T79">4</text:span><text:span text:style-name="T63">（最右）</text:span></text:p>
          </table:table-cell>
          <table:table-cell table:style-name="表格27.A2" office:value-type="string">
            <text:p text:style-name="Standard" loext:marker-style-name="T62"><text:span text:style-name="T79">Push 4</text:span><text:span text:style-name="T62"/></text:p>
          </table:table-cell>
          <table:table-cell table:style-name="表格27.A2" office:value-type="string">
            <text:p text:style-name="Standard" loext:marker-style-name="T62"><text:span text:style-name="T79">[4]</text:span><text:span text:style-name="T62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2"><text:span text:style-name="T79">3</text:span><text:span text:style-name="T62"/></text:p>
          </table:table-cell>
          <table:table-cell table:style-name="表格27.A3" office:value-type="string">
            <text:p text:style-name="Standard" loext:marker-style-name="T62"><text:span text:style-name="T79">Push 3</text:span><text:span text:style-name="T62"/></text:p>
          </table:table-cell>
          <table:table-cell table:style-name="表格27.A3" office:value-type="string">
            <text:p text:style-name="Standard" loext:marker-style-name="T62"><text:span text:style-name="T79">[4, 3]</text:span><text:span text:style-name="T62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2"><text:span text:style-name="T79">2</text:span><text:span text:style-name="T62"/></text:p>
          </table:table-cell>
          <table:table-cell table:style-name="表格27.A2" office:value-type="string">
            <text:p text:style-name="Standard" loext:marker-style-name="T62"><text:span text:style-name="T79">Push 2</text:span><text:span text:style-name="T62"/></text:p>
          </table:table-cell>
          <table:table-cell table:style-name="表格27.A2" office:value-type="string">
            <text:p text:style-name="Standard" loext:marker-style-name="T62"><text:span text:style-name="T79">[4, 3, 2]</text:span><text:span text:style-name="T62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2"><text:span text:style-name="T79">*</text:span><text:span text:style-name="T62"/></text:p>
          </table:table-cell>
          <table:table-cell table:style-name="表格27.A3" office:value-type="string">
            <text:p text:style-name="Standard" loext:marker-style-name="T62"><text:span text:style-name="T110">Pop 2</text:span><text:span text:style-name="T79">, Pop 3</text:span><text:span text:style-name="T63">，計算 </text:span><text:span text:style-name="T110">2</text:span><text:span text:style-name="T79">×3=6</text:span><text:span text:style-name="T63">，</text:span><text:span text:style-name="T79">Push 6</text:span></text:p>
          </table:table-cell>
          <table:table-cell table:style-name="表格27.A3" office:value-type="string">
            <text:p text:style-name="Standard" loext:marker-style-name="T62"><text:span text:style-name="T79">[4, 6]</text:span><text:span text:style-name="T62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2"><text:span text:style-name="T79">+ </text:span><text:span text:style-name="T63">（最左）</text:span></text:p>
          </table:table-cell>
          <table:table-cell table:style-name="表格27.A2" office:value-type="string">
            <text:p text:style-name="Standard" loext:marker-style-name="T62"><text:span text:style-name="T110">Pop 6</text:span><text:span text:style-name="T79">, Pop 4</text:span><text:span text:style-name="T63">，計算 </text:span><text:span text:style-name="T110">6</text:span><text:span text:style-name="T79">+4=10</text:span><text:span text:style-name="T63">，</text:span><text:span text:style-name="T79">Push 10</text:span></text:p>
          </table:table-cell>
          <table:table-cell table:style-name="表格27.A2" office:value-type="string">
            <text:p text:style-name="Standard" loext:marker-style-name="T62"><text:span text:style-name="T79">[10]</text:span><text:span text:style-name="T62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42"><text:span text:style-name="T141">結果</text:span><text:span text:style-name="T142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42"><text:span text:style-name="T147">★ </text:span><text:span text:style-name="T141">答案 </text:span><text:span text:style-name="T147">= 10</text:span></text:p>
          </table:table-cell>
        </table:table-row>
      </table:table>
      <text:p text:style-name="P6"/>
      <text:h text:style-name="P38" text:outline-level="2" loext:marker-style-name="T30"><text:span text:style-name="T30">Postfix → Expression Tree</text:span><text:span text:style-name="T30"/></text:h>
      <text:p text:style-name="P12">我們在做什麼？</text:p>
      <text:p text:style-name="P13">Postfix 其實只是一種書寫方式，電腦容易處理。但我們需要知道原始的算式結構。</text:p>
      <text:p text:style-name="P18">例如：<text:span text:style-name="T205">AB+C* 其實代表什麼？</text:span></text:p>
      <text:p text:style-name="P17">答案是：(A+B)*C</text:p>
      <text:p text:style-name="Standard"/>
      <text:p text:style-name="P15">所以這個過程的目的只有一個：<text:span text:style-name="T168">從 AB+C* 恢復出 (A+B)*C</text:span></text:p>
      <text:p text:style-name="Standard"/>
      <text:p text:style-name="P23">⭐ 最重要的觀念</text:p>
      <text:p text:style-name="P31">Stack 裡放的不是字符（A、B、C、+、*），</text:p>
      <text:p text:style-name="P31">而是<text:span text:style-name="T95">逐漸完成的算式</text:span>。</text:p>
      <text:p text:style-name="Standard"/>
      <text:p text:style-name="P13">看這個表格，一切都清楚了：</text:p>
      <text:p text:style-name="Standard"/>
      <text:p text:style-name="P20">讀到 <text:s text:c="3"/>動作 <text:s text:c="25"/>Stack</text:p>
      <text:p text:style-name="P21">A <text:s text:c="5"/>Push A <text:s text:c="23"/>[A]</text:p>
      <text:p text:style-name="P21">B <text:s text:c="5"/>Push B <text:s text:c="23"/>[A][B]</text:p>
      <text:p text:style-name="P24">+ <text:span text:style-name="T206">Pop B、Pop A、組成(A+B)</text:span>、<text:span text:style-name="T207">Push <text:s text:c="2"/>[(A+B)]</text:span></text:p>
      <text:p text:style-name="P21">C <text:s text:c="5"/>Push C <text:s text:c="23"/>[(A+B)][C]</text:p>
      <text:p text:style-name="P24">* <text:span text:style-name="T206">Pop C、Pop(A+B)</text:span>、<text:span text:style-name="T207">組成((A+B)*C)</text:span>、<text:span text:style-name="T180">Push [((A+B)*C)]</text:span></text:p>
      <text:p text:style-name="Standard"/>
      <text:p text:style-name="P29">⚠️ 注意：A、B 不是一直待在 Stack 裡！</text:p>
      <text:p text:style-name="Standard"><text:soft-page-break/></text:p>
      <text:p text:style-name="P13">當看到 + 時：</text:p>
      <text:p text:style-name="P14"><text:s text:c="2"/>✓ Pop B（此時 B 被取出）</text:p>
      <text:p text:style-name="P14"><text:s text:c="2"/>✓ Pop A（此時 A 也被取出，Stack 變空）</text:p>
      <text:p text:style-name="P14"><text:s text:c="2"/>✓ <text:span text:style-name="T94">組成新的「部分算式」：(A+B)</text:span></text:p>
      <text:p text:style-name="P14"><text:s text:c="2"/>✓<text:span text:style-name="T150"> Push (A+B) 回去</text:span>（<text:span text:style-name="T206">現在 Stack 裡只有一個元素：</text:span><text:span text:style-name="T135">(A+B)</text:span>）</text:p>
      <text:p text:style-name="Standard"/>
      <text:p text:style-name="P32">所以 Stack 真正存的是：「已經組好的部分算式」</text:p>
      <text:p text:style-name="Standard"/>
      <text:p text:style-name="P13">(A+B) 其實只是這棵樹的另一種寫法：</text:p>
      <text:p text:style-name="Standard"/>
      <text:p text:style-name="P22"><text:s text:c="2"/>+</text:p>
      <text:p text:style-name="P21"><text:s/>/ \</text:p>
      <text:p text:style-name="P21">A <text:s text:c="2"/>B</text:p>
      <text:p text:style-name="Standard"/>
      <text:p text:style-name="P15">換句話說：Stack 裡存的是「樹」，只是用算式的方式寫出來而已。</text:p>
      <text:p text:style-name="P13">有沒有發現？根本不用提什麼「樹」。</text:p>
      <text:p text:style-name="P15">你只要想成：<text:span text:style-name="T111">Stack 裡存的就是「半完成的算式」</text:span>。</text:p>
      <text:p text:style-name="Standard"/>
      <text:p text:style-name="P12">逐步理解：AB+C*</text:p>
      <text:p text:style-name="Standard"/>
      <text:p text:style-name="P19">讀到 A</text:p>
      <text:p text:style-name="P13">A 就是一個簡單的算式。放進 Stack。</text:p>
      <text:p text:style-name="P21">Stack：[A]</text:p>
      <text:p text:style-name="Standard"/>
      <text:p text:style-name="P19">讀到 B</text:p>
      <text:p text:style-name="P13">B 也是一個簡單的算式。放進 Stack。</text:p>
      <text:p text:style-name="P21">Stack：[A, B]</text:p>
      <text:p text:style-name="Standard"/>
      <text:p text:style-name="P19">讀到 +</text:p>
      <text:p text:style-name="P13"><text:span text:style-name="T206">現在遇到一個運算子</text:span>。<text:span text:style-name="T208">運算子需要多少個東西？</text:span></text:p>
      <text:p text:style-name="P13"><text:span text:style-name="T208">+ 需要兩個</text:span>。所以<text:span text:style-name="T180">從 Stack 拿兩個出來</text:span>。</text:p>
      <text:p text:style-name="Standard"/>
      <text:p text:style-name="P14">第一次 Pop → B（最後進來的先出來）</text:p>
      <text:p text:style-name="P14">第二次 Pop → A</text:p>
      <text:p text:style-name="P33">把它們組合：A + B = (A+B)</text:p>
      <text:p text:style-name="P13"><text:span text:style-name="T176">放回 Stack</text:span>。</text:p>
      <text:p text:style-name="P25">Stack：[A+B]</text:p>
      <text:p text:style-name="Standard"/>
      <text:p text:style-name="P19">讀到 C</text:p>
      <text:p text:style-name="P13">C 也是一個簡單的算式。放進 Stack。</text:p>
      <text:p text:style-name="P21">Stack：[A+B, C]</text:p>
      <text:p text:style-name="Standard"/>
      <text:p text:style-name="P19">讀到 *</text:p>
      <text:p text:style-name="P13">又遇到一個運算子。* 也需要兩個。</text:p>
      <text:p text:style-name="Standard"/>
      <text:p text:style-name="P14">第一次 Pop → C</text:p>
      <text:p text:style-name="P14">第二次 Pop → A+B</text:p>
      <text:p text:style-name="P13">把它們組合：(A+B) * C = (A+B)*C</text:p>
      <text:p text:style-name="P13">放回 Stack。</text:p>
      <text:p text:style-name="P25">Stack：[A+B)*C]</text:p>
      <text:p text:style-name="Standard"/>
      <text:p text:style-name="P16">完成！Stack 裡剩下的就是原始的算式。</text:p>
      <text:p text:style-name="Standard"/>
      <text:p text:style-name="Standard"><text:soft-page-break/><text:span text:style-name="T40">為什麼先 Pop 出來的是「右邊」？</text:span></text:p>
      <text:p text:style-name="P13">因為 Stack 是 LIFO（Last In First Out）。最後進來的先出來。</text:p>
      <text:p text:style-name="Standard"/>
      <text:p text:style-name="P18">例如：AB-</text:p>
      <text:p text:style-name="P13">A 先進來，B 後進來。</text:p>
      <text:p text:style-name="P13">讀到 -，先 Pop 出 B（後進的），再 Pop 出 A（先進的）。</text:p>
      <text:p text:style-name="P26">所以結果是：A - B（✓ 正確）</text:p>
      <text:p text:style-name="P34"/>
      <text:p text:style-name="P30">如果反過來（B - A），就完全錯了。</text:p>
      <text:p text:style-name="Standard"/>
      <text:p text:style-name="P12">從算式到樹（最後一步）</text:p>
      <text:p text:style-name="P13">現在你已經理解了 (A+B)*C 這個算式。</text:p>
      <text:p text:style-name="P13">只需要把它畫成樹就可以了。</text:p>
      <text:p text:style-name="Standard"/>
      <text:p text:style-name="P21">*</text:p>
      <text:p text:style-name="P21">/ \</text:p>
      <text:p text:style-name="P21">+ <text:s text:c="2"/>C</text:p>
      <text:p text:style-name="P21">/ \</text:p>
      <text:p text:style-name="P21">A <text:s text:c="2"/>B</text:p>
      <text:p text:style-name="Standard"/>
      <text:p text:style-name="P13">看？這棵樹就是 (A+B)*C 的視覺表示。</text:p>
      <text:p text:style-name="Standard"/>
      <text:p text:style-name="P12">記住最簡單的方式</text:p>
      <text:p text:style-name="P13">不用一開始就記樹的結構。先掌握：</text:p>
      <text:p text:style-name="Standard"/>
      <text:p text:style-name="P27">✓ <text:span text:style-name="T205">遇到字母 → 放進 Stack</text:span></text:p>
      <text:p text:style-name="P27">✓ <text:span text:style-name="T209">遇到運算子 → Pop 兩個</text:span>，<text:span text:style-name="T210">組合成新的算式</text:span>，<text:span text:style-name="T161">再放回</text:span></text:p>
      <text:p text:style-name="P28">✓ Stack 剩下的就是答案</text:p>
      <text:p text:style-name="Standard"/>
      <text:p text:style-name="P15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62" loext:marker-style-name="T49"><text:span text:style-name="T66">① </text:span><text:span text:style-name="T48">看到 </text:span><text:span text:style-name="T66">A → </text:span><text:span text:style-name="T48">建節點 </text:span><text:span text:style-name="T66">A</text:span><text:span text:style-name="T48">，</text:span><text:span text:style-name="T66">Push</text:span></text:p>
            <text:p text:style-name="P59" loext:marker-style-name="T49"><text:span text:style-name="T66">② </text:span><text:span text:style-name="T48">看到 </text:span><text:span text:style-name="T66">B → </text:span><text:span text:style-name="T48">建節點 </text:span><text:span text:style-name="T66">B</text:span><text:span text:style-name="T48">，</text:span><text:span text:style-name="T66">Push</text:span></text:p>
            <text:p text:style-name="P59" loext:marker-style-name="T49"><text:span text:style-name="T66">③ </text:span><text:span text:style-name="T48">看到 </text:span><text:span text:style-name="T66">+ → Pop B</text:span><text:span text:style-name="T48">（右子樹），</text:span><text:span text:style-name="T66">Pop A</text:span><text:span text:style-name="T48">（左子樹），建 </text:span><text:span text:style-name="T66">+ </text:span><text:span text:style-name="T48">節點，</text:span><text:span text:style-name="T66">Push </text:span><text:span text:style-name="T48">這棵小樹</text:span></text:p>
            <text:p text:style-name="P59" loext:marker-style-name="T49"><text:span text:style-name="T66">④ </text:span><text:span text:style-name="T48">看到 </text:span><text:span text:style-name="T66">C → </text:span><text:span text:style-name="T48">建節點 </text:span><text:span text:style-name="T66">C</text:span><text:span text:style-name="T48">，</text:span><text:span text:style-name="T66">Push</text:span></text:p>
            <text:p text:style-name="P60" loext:marker-style-name="T49"><text:span text:style-name="T66">⑤ </text:span><text:span text:style-name="T48">看到 </text:span><text:span text:style-name="T66">* → Pop C</text:span><text:span text:style-name="T48">（右子樹），</text:span><text:span text:style-name="T66">Pop +</text:span><text:span text:style-name="T48">樹（左子樹），建 </text:span><text:span text:style-name="T66">* </text:span><text:span text:style-name="T48">根節點</text:span></text:p>
            <text:p text:style-name="P54" loext:marker-style-name="T34"><text:span text:style-name="T33">結果：</text:span><text:span text:style-name="T35">根為 </text:span><text:span text:style-name="T46">*</text:span><text:span text:style-name="T35">，左子樹為 </text:span><text:span text:style-name="T46">+</text:span><text:span text:style-name="T35">（左</text:span><text:span text:style-name="T46">A</text:span><text:span text:style-name="T35">右</text:span><text:span text:style-name="T46">B</text:span><text:span text:style-name="T35">），右子樹為 </text:span><text:span text:style-name="T46">C</text:span></text:p>
          </table:table-cell>
        </table:table-row>
      </table:table>
      <text:h text:style-name="P37" text:outline-level="1" loext:marker-style-name="T13"><text:span text:style-name="T12"/></text:h>
      <text:h text:style-name="P36" text:outline-level="1" loext:marker-style-name="T13"><text:span text:style-name="T12">第八部分：考試速記總整理</text:span></text:h>
      <text:p text:style-name="P2"/>
      <text:h text:style-name="P38" text:outline-level="2" loext:marker-style-name="T30"><text:span text:style-name="T29">六大必背考點（重要度排序）</text:span><text:span text:style-name="T3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4"><text:span text:style-name="T80">★★★★★</text:span><text:span text:style-name="T64"/></text:p>
          </table:table-cell>
          <table:table-cell table:style-name="表格29.A2" office:value-type="string">
            <text:p text:style-name="P5" loext:marker-style-name="T64"><text:span text:style-name="T80">Postfix </text:span><text:span text:style-name="T65">用 </text:span><text:span text:style-name="T80">Stack </text:span><text:span text:style-name="T65">求值</text:span></text:p>
          </table:table-cell>
          <table:table-cell table:style-name="表格29.A2" office:value-type="string">
            <text:p text:style-name="P5" loext:marker-style-name="T64"><text:span text:style-name="T65">從左往右，運算元 </text:span><text:span text:style-name="T80">Push</text:span><text:span text:style-name="T65">，運算子 </text:span><text:span text:style-name="T80">Pop </text:span><text:span text:style-name="T65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4"><text:span text:style-name="T80">★★★★★</text:span><text:span text:style-name="T64"/></text:p>
          </table:table-cell>
          <table:table-cell table:style-name="表格29.A2" office:value-type="string">
            <text:p text:style-name="P5" loext:marker-style-name="T64"><text:span text:style-name="T80">Infix → Postfix </text:span><text:span text:style-name="T65">轉換</text:span></text:p>
          </table:table-cell>
          <table:table-cell table:style-name="表格29.A2" office:value-type="string">
            <text:p text:style-name="P5" loext:marker-style-name="T64"><text:span text:style-name="T65">五條規則（括號、優先權、左結合）</text:span><text:span text:style-name="T6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4"><text:span text:style-name="T80">★★★★★</text:span><text:span text:style-name="T64"/></text:p>
          </table:table-cell>
          <table:table-cell table:style-name="表格29.A2" office:value-type="string">
            <text:p text:style-name="P5" loext:marker-style-name="T64"><text:span text:style-name="T80">Preorder = Prefix</text:span><text:span text:style-name="T64"/></text:p>
            <text:p text:style-name="P5" loext:marker-style-name="T64"><text:span text:style-name="T80">Inorder = Infix</text:span><text:span text:style-name="T64"/></text:p>
            <text:p text:style-name="P5" loext:marker-style-name="T64"><text:span text:style-name="T80">Postorder = Postfix</text:span><text:span text:style-name="T64"/></text:p>
          </table:table-cell>
          <table:table-cell table:style-name="表格29.A2" office:value-type="string">
            <text:p text:style-name="P5" loext:marker-style-name="T64"><text:span text:style-name="T65">走訪方式 ↔ 表示法對應</text:span><text:span text:style-name="T64"/></text:p>
          </table:table-cell>
        </table:table-row>
        <table:table-row table:style-name="表格29.1">
          <table:table-cell table:style-name="表格29.A5" office:value-type="string">
            <text:p text:style-name="P5" loext:marker-style-name="T64"><text:span text:style-name="T80">★★★★☆</text:span><text:span text:style-name="T64"/></text:p>
          </table:table-cell>
          <table:table-cell table:style-name="表格29.A5" office:value-type="string">
            <text:p text:style-name="P5" loext:marker-style-name="T64"><text:span text:style-name="T80">Expression Tree </text:span><text:span text:style-name="T65">建樹</text:span></text:p>
          </table:table-cell>
          <table:table-cell table:style-name="表格29.A5" office:value-type="string">
            <text:p text:style-name="P5" loext:marker-style-name="T64"><text:span text:style-name="T65">找最後算的運算子 </text:span><text:span text:style-name="T80">= </text:span><text:span text:style-name="T65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4"><text:span text:style-name="T80">★★★★☆</text:span><text:span text:style-name="T64"/></text:p>
          </table:table-cell>
          <table:table-cell table:style-name="表格29.A5" office:value-type="string">
            <text:p text:style-name="P5" loext:marker-style-name="T64"><text:span text:style-name="T80">Prefix </text:span><text:span text:style-name="T65">用 </text:span><text:span text:style-name="T80">Stack </text:span><text:span text:style-name="T65">求值</text:span></text:p>
          </table:table-cell>
          <table:table-cell table:style-name="表格29.A5" office:value-type="string">
            <text:p text:style-name="P5" loext:marker-style-name="T64"><text:span text:style-name="T65">從右往左，先 </text:span><text:span text:style-name="T80">Pop </text:span><text:span text:style-name="T65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4"><text:span text:style-name="T80">★★★☆☆</text:span><text:span text:style-name="T64"/></text:p>
          </table:table-cell>
          <table:table-cell table:style-name="表格29.A7" office:value-type="string">
            <text:p text:style-name="P5" loext:marker-style-name="T64"><text:span text:style-name="T80">Postfix → Expression Tree</text:span><text:span text:style-name="T64"/></text:p>
          </table:table-cell>
          <table:table-cell table:style-name="表格29.A7" office:value-type="string">
            <text:p text:style-name="P5" loext:marker-style-name="T64"><text:span text:style-name="T65">運算元建節點 </text:span><text:span text:style-name="T80">Push</text:span><text:span text:style-name="T65">，運算子合併兩棵子樹</text:span></text:p>
          </table:table-cell>
        </table:table-row>
      </table:table>
      <text:p text:style-name="P6"/>
      <text:h text:style-name="P38" text:outline-level="2" loext:marker-style-name="T30"><text:span text:style-name="T30">Infix → Postfix </text:span><text:span text:style-name="T29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59" loext:marker-style-name="T25"><text:span text:style-name="T25">2. <text:s/>( <text:s/>→ Push</text:span><text:span text:style-name="T25"/></text:p>
            <text:p text:style-name="P59" loext:marker-style-name="T25"><text:span text:style-name="T25">3. <text:s/>) <text:s/>→ Pop 直到 (（括號不輸出）</text:span><text:span text:style-name="T25"/></text:p>
            <text:p text:style-name="P59" loext:marker-style-name="T25"><text:span text:style-name="T25">4. Operator → Stack 頂優先 ≥ 自己 → 先 Pop，再 Push</text:span><text:span text:style-name="T25"/></text:p>
            <text:p text:style-name="P60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38" text:outline-level="2" loext:marker-style-name="T30"><text:span text:style-name="T29">三種表示法互轉速查表</text:span><text:span text:style-name="T30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4"><text:span text:style-name="T80">Prefix </text:span><text:span text:style-name="T65">前置式</text:span></text:p>
          </table:table-cell>
          <table:table-cell table:style-name="表格31.A2" office:value-type="string">
            <text:p text:style-name="Standard" loext:marker-style-name="T64"><text:span text:style-name="T80">+AB</text:span><text:span text:style-name="T64"/></text:p>
          </table:table-cell>
          <table:table-cell table:style-name="表格31.A2" office:value-type="string">
            <text:p text:style-name="Standard" loext:marker-style-name="T64"><text:span text:style-name="T65">運算子在前</text:span><text:span text:style-name="T64"/></text:p>
          </table:table-cell>
          <table:table-cell table:style-name="表格31.A2" office:value-type="string">
            <text:p text:style-name="Standard" loext:marker-style-name="T64"><text:span text:style-name="T80">Stack</text:span><text:span text:style-name="T65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4"><text:span text:style-name="T80">Infix </text:span><text:span text:style-name="T65">中置式</text:span></text:p>
          </table:table-cell>
          <table:table-cell table:style-name="表格31.A3" office:value-type="string">
            <text:p text:style-name="Standard" loext:marker-style-name="T64"><text:span text:style-name="T80">A+B</text:span><text:span text:style-name="T64"/></text:p>
          </table:table-cell>
          <table:table-cell table:style-name="表格31.A3" office:value-type="string">
            <text:p text:style-name="Standard" loext:marker-style-name="T64"><text:span text:style-name="T65">人類習慣寫法，需括號</text:span><text:span text:style-name="T64"/></text:p>
          </table:table-cell>
          <table:table-cell table:style-name="表格31.A3" office:value-type="string">
            <text:p text:style-name="Standard" loext:marker-style-name="T64"><text:span text:style-name="T65">需考慮優先權</text:span><text:span text:style-name="T64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4"><text:span text:style-name="T80">Postfix </text:span><text:span text:style-name="T65">後置式</text:span></text:p>
          </table:table-cell>
          <table:table-cell table:style-name="表格31.A4" office:value-type="string">
            <text:p text:style-name="Standard" loext:marker-style-name="T64"><text:span text:style-name="T80">AB+</text:span><text:span text:style-name="T64"/></text:p>
          </table:table-cell>
          <table:table-cell table:style-name="表格31.A4" office:value-type="string">
            <text:p text:style-name="Standard" loext:marker-style-name="T64"><text:span text:style-name="T65">無括號，電腦最愛</text:span><text:span text:style-name="T64"/></text:p>
          </table:table-cell>
          <table:table-cell table:style-name="表格31.A4" office:value-type="string">
            <text:p text:style-name="Standard" loext:marker-style-name="T64"><text:span text:style-name="T80">Stack</text:span><text:span text:style-name="T65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63" loext:marker-style-name="T22"><text:span text:style-name="T23">最終核心記憶句（一句話串起整章）</text:span><text:span text:style-name="T22"/></text:p>
            <text:p text:style-name="P47" loext:marker-style-name="T42"><text:span text:style-name="T41">「</text:span><text:span text:style-name="T47">Expression Tree </text:span><text:span text:style-name="T41">求值 </text:span><text:span text:style-name="T47">= Postorder </text:span><text:span text:style-name="T41">走訪 </text:span><text:span text:style-name="T47">= Postfix </text:span><text:span text:style-name="T41">計算 </text:span><text:span text:style-name="T47">= Stack</text:span><text:span text:style-name="T41">」</text:span></text:p>
            <text:p text:style-name="P64" loext:marker-style-name="T49"><text:span text:style-name="T48">只要懂這一句，整章 </text:span><text:span text:style-name="T66">Expression Tree </text:span><text:span text:style-name="T48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29T08:21:54.880000000</dc:date>
    <meta:editing-cycles>98</meta:editing-cycles>
    <meta:editing-duration>PT13H22M33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11" meta:word-count="4144" meta:character-count="7654" meta:non-whitespace-character-count="6236"/>
    <meta:user-defined meta:name="AppVersion">15.0000</meta:user-defined>
  </office:meta>
</office:document-meta>
</file>