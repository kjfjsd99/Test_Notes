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.012cm" fo:margin-top="0cm" fo:margin-bottom="0cm" table:align="left" style:writing-mode="page"/>
    </style:style>
    <style:style style:name="表格1.A" style:family="table-column">
      <style:table-column-properties style:column-width="2.82cm"/>
    </style:style>
    <style:style style:name="表格1.B" style:family="table-column">
      <style:table-column-properties style:column-width="3.882cm"/>
    </style:style>
    <style:style style:name="表格1.C" style:family="table-column">
      <style:table-column-properties style:column-width="2.469cm"/>
    </style:style>
    <style:style style:name="表格1.D" style:family="table-column">
      <style:table-column-properties style:column-width="2.468cm"/>
    </style:style>
    <style:style style:name="表格1.F" style:family="table-column">
      <style:table-column-properties style:column-width="2.40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" style:family="table">
      <style:table-properties style:width="16.51cm" fo:margin-left="0.01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49" style:family="table">
      <style:table-properties style:width="16.51cm" fo:margin-left="0.012cm" fo:margin-top="0cm" fo:margin-bottom="0cm" table:align="left" style:writing-mode="page"/>
    </style:style>
    <style:style style:name="表格49.A" style:family="table-column">
      <style:table-column-properties style:column-width="2.82cm"/>
    </style:style>
    <style:style style:name="表格49.B" style:family="table-column">
      <style:table-column-properties style:column-width="2.117cm"/>
    </style:style>
    <style:style style:name="表格49.C" style:family="table-column">
      <style:table-column-properties style:column-width="5.644cm"/>
    </style:style>
    <style:style style:name="表格49.D" style:family="table-column">
      <style:table-column-properties style:column-width="5.92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9.C2" style:family="table-cell">
      <style:table-cell-properties style:vertical-align="middle" fo:background-color="#f50057" fo:padding-left="0.212cm" fo:padding-right="0.212cm" fo:padding-top="0.141cm" fo:padding-bottom="0.141cm" fo:border="0.75pt solid #aaaaaa">
        <style:background-image/>
      </style:table-cell-properties>
    </style:style>
    <style:style style:name="表格4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0" style:family="table">
      <style:table-properties style:width="16.51cm" fo:margin-left="0.01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51" style:family="table">
      <style:table-properties style:width="7.056cm" fo:margin-left="0.012cm" fo:margin-top="0cm" fo:margin-bottom="0cm" table:align="left" style:writing-mode="page"/>
    </style:style>
    <style:style style:name="表格51.A" style:family="table-column">
      <style:table-column-properties style:column-width="7.056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fff" fo:padding-left="0.265cm" fo:padding-right="0.265cm" fo:padding-top="0.141cm" fo:padding-bottom="0.141cm" fo:border="0.75pt solid #c00000">
        <style:background-image/>
      </style:table-cell-properties>
    </style:style>
    <style:style style:name="表格52" style:family="table">
      <style:table-properties style:width="16.51cm" fo:margin-left="0.012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176cm" fo:padding-bottom="0.176cm" fo:border="0.75pt solid #2e75b6">
        <style:background-image/>
      </style:table-cell-properties>
    </style:style>
    <style:style style:name="表格53" style:family="table">
      <style:table-properties style:width="16.51cm" fo:margin-left="0.012cm" fo:margin-top="0cm" fo:margin-bottom="0cm" table:align="left" style:writing-mode="page"/>
    </style:style>
    <style:style style:name="表格53.A" style:family="table-column">
      <style:table-column-properties style:column-width="3.173cm"/>
    </style:style>
    <style:style style:name="表格53.B" style:family="table-column">
      <style:table-column-properties style:column-width="7.34cm"/>
    </style:style>
    <style:style style:name="表格53.C" style:family="table-column">
      <style:table-column-properties style:column-width="5.997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4" style:family="table">
      <style:table-properties style:width="16.51cm" fo:margin-left="0.01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55" style:family="table">
      <style:table-properties style:width="12.347cm" fo:margin-left="0cm" fo:margin-top="0cm" fo:margin-bottom="0cm" table:align="left" style:writing-mode="page"/>
    </style:style>
    <style:style style:name="表格55.A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fffff" fo:padding-left="0.212cm" fo:padding-right="0.212cm" fo:padding-top="0.106cm" fo:padding-bottom="0.106cm" fo:border="none">
        <style:background-image/>
      </style:table-cell-properties>
    </style:style>
    <style:style style:name="表格56" style:family="table">
      <style:table-properties style:width="16.51cm" fo:margin-left="0.012cm" fo:margin-top="0cm" fo:margin-bottom="0cm" table:align="left" style:writing-mode="page"/>
    </style:style>
    <style:style style:name="表格56.A" style:family="table-column">
      <style:table-column-properties style:column-width="2.82cm"/>
    </style:style>
    <style:style style:name="表格56.B" style:family="table-column">
      <style:table-column-properties style:column-width="3.175cm"/>
    </style:style>
    <style:style style:name="表格56.C" style:family="table-column">
      <style:table-column-properties style:column-width="6.352cm"/>
    </style:style>
    <style:style style:name="表格56.D" style:family="table-column">
      <style:table-column-properties style:column-width="4.163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7" style:family="table">
      <style:table-properties style:width="16.51cm" fo:margin-left="0.012cm" fo:margin-top="0cm" fo:margin-bottom="0cm" table:align="left" style:writing-mode="page"/>
    </style:style>
    <style:style style:name="表格57.A" style:family="table-column">
      <style:table-column-properties style:column-width="4.055cm"/>
    </style:style>
    <style:style style:name="表格57.B" style:family="table-column">
      <style:table-column-properties style:column-width="0.355cm"/>
    </style:style>
    <style:style style:name="表格57.G" style:family="table-column">
      <style:table-column-properties style:column-width="3.28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57.B1" style:family="table-cell">
      <style:table-cell-properties fo:background-color="#ffffff" fo:padding="0cm" fo:border="none">
        <style:background-image/>
      </style:table-cell-properties>
    </style:style>
    <style:style style:name="表格57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7.G1" style:family="table-cell">
      <style:table-cell-properties fo:background-color="#f2f2f2" fo:padding-left="0.212cm" fo:padding-right="0.212cm" fo:padding-top="0.141cm" fo:padding-bottom="0.141cm" fo:border="0.75pt solid #595959">
        <style:background-image/>
      </style:table-cell-properties>
    </style:style>
    <style:style style:name="表格58" style:family="table">
      <style:table-properties style:width="16.51cm" fo:margin-left="0.01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59" style:family="table">
      <style:table-properties style:width="16.51cm" fo:margin-left="0.012cm" fo:margin-top="0cm" fo:margin-bottom="0cm" table:align="left" style:writing-mode="page"/>
    </style:style>
    <style:style style:name="表格59.A" style:family="table-column">
      <style:table-column-properties style:column-width="2.997cm"/>
    </style:style>
    <style:style style:name="表格59.B" style:family="table-column">
      <style:table-column-properties style:column-width="8.398cm"/>
    </style:style>
    <style:style style:name="表格59.C" style:family="table-column">
      <style:table-column-properties style:column-width="5.11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" style:family="table">
      <style:table-properties style:width="8.819cm" fo:margin-left="0.012cm" fo:margin-top="0cm" fo:margin-bottom="0cm" table:align="left" style:writing-mode="page"/>
    </style:style>
    <style:style style:name="表格3.A" style:family="table-column">
      <style:table-column-properties style:column-width="8.819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4" style:family="table">
      <style:table-properties style:width="14.746cm" fo:margin-left="0.012cm" fo:margin-top="0cm" fo:margin-bottom="0cm" table:align="left" style:writing-mode="page"/>
    </style:style>
    <style:style style:name="表格4.A" style:family="table-column">
      <style:table-column-properties style:column-width="1.588cm"/>
    </style:style>
    <style:style style:name="表格4.B" style:family="table-column">
      <style:table-column-properties style:column-width="3.175cm"/>
    </style:style>
    <style:style style:name="表格4.C" style:family="table-column">
      <style:table-column-properties style:column-width="4.408cm"/>
    </style:style>
    <style:style style:name="表格4.D" style:family="table-column">
      <style:table-column-properties style:column-width="5.576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60" style:family="table">
      <style:table-properties style:width="16.51cm" fo:margin-left="0.012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61" style:family="table">
      <style:table-properties style:width="7.056cm" fo:margin-left="0.012cm" fo:margin-top="0cm" fo:margin-bottom="0cm" table:align="left" style:writing-mode="page"/>
    </style:style>
    <style:style style:name="表格61.A" style:family="table-column">
      <style:table-column-properties style:column-width="7.056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2" style:family="table">
      <style:table-properties style:width="12.347cm" fo:margin-left="0.012cm" fo:margin-top="0cm" fo:margin-bottom="0cm" table:align="left" style:writing-mode="page"/>
    </style:style>
    <style:style style:name="表格62.A" style:family="table-column">
      <style:table-column-properties style:column-width="12.347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3" style:family="table">
      <style:table-properties style:width="12.347cm" fo:margin-left="0.012cm" fo:margin-top="0cm" fo:margin-bottom="0cm" table:align="left" style:writing-mode="page"/>
    </style:style>
    <style:style style:name="表格63.A" style:family="table-column">
      <style:table-column-properties style:column-width="12.347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ffde7" fo:padding-left="0.265cm" fo:padding-right="0.265cm" fo:padding-top="0.141cm" fo:padding-bottom="0.141cm" fo:border="0.75pt solid #7f6000">
        <style:background-image/>
      </style:table-cell-properties>
    </style:style>
    <style:style style:name="表格64" style:family="table">
      <style:table-properties style:width="14.111cm" fo:margin-left="0.012cm" fo:margin-top="0cm" fo:margin-bottom="0cm" table:align="left" style:writing-mode="page"/>
    </style:style>
    <style:style style:name="表格64.A" style:family="table-column">
      <style:table-column-properties style:column-width="6.526cm"/>
    </style:style>
    <style:style style:name="表格64.B" style:family="table-column">
      <style:table-column-properties style:column-width="1.05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64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6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" style:family="table">
      <style:table-properties style:width="16.51cm" fo:margin-left="0.01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6" style:family="table">
      <style:table-properties style:width="16.51cm" fo:margin-left="0.012cm" fo:margin-top="0cm" fo:margin-bottom="0cm" table:align="left" style:writing-mode="page"/>
    </style:style>
    <style:style style:name="表格6.A" style:family="table-column">
      <style:table-column-properties style:column-width="5.503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" style:family="table">
      <style:table-properties style:width="16.51cm" fo:margin-left="0.01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8" style:family="table">
      <style:table-properties style:width="13.688cm" fo:margin-left="0.012cm" fo:margin-top="0cm" fo:margin-bottom="0cm" table:align="left" style:writing-mode="page"/>
    </style:style>
    <style:style style:name="表格8.A" style:family="table-column">
      <style:table-column-properties style:column-width="2.468cm"/>
    </style:style>
    <style:style style:name="表格8.B" style:family="table-column">
      <style:table-column-properties style:column-width="4.235cm"/>
    </style:style>
    <style:style style:name="表格8.C" style:family="table-column">
      <style:table-column-properties style:column-width="4.41cm"/>
    </style:style>
    <style:style style:name="表格8.D" style:family="table-column">
      <style:table-column-properties style:column-width="2.575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9" style:family="table">
      <style:table-properties style:width="16.51cm" fo:margin-left="0.01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10" style:family="table">
      <style:table-properties style:width="16.51cm" fo:margin-left="0.012cm" fo:margin-top="0cm" fo:margin-bottom="0cm" table:align="left" style:writing-mode="page"/>
    </style:style>
    <style:style style:name="表格10.A" style:family="table-column">
      <style:table-column-properties style:column-width="7.938cm"/>
    </style:style>
    <style:style style:name="表格10.B" style:family="table-column">
      <style:table-column-properties style:column-width="0.633cm"/>
    </style:style>
    <style:style style:name="表格10.C" style:family="table-column">
      <style:table-column-properties style:column-width="7.939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0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0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1" style:family="table">
      <style:table-properties style:width="16.51cm" fo:margin-left="0.012cm" fo:margin-top="0cm" fo:margin-bottom="0cm" table:align="left" style:writing-mode="page"/>
    </style:style>
    <style:style style:name="表格11.A" style:family="table-column">
      <style:table-column-properties style:column-width="7.938cm"/>
    </style:style>
    <style:style style:name="表格11.B" style:family="table-column">
      <style:table-column-properties style:column-width="0.633cm"/>
    </style:style>
    <style:style style:name="表格11.C" style:family="table-column">
      <style:table-column-properties style:column-width="7.939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1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1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2" style:family="table">
      <style:table-properties style:width="16.51cm" fo:margin-left="0.012cm" fo:margin-top="0cm" fo:margin-bottom="0cm" table:align="left" style:writing-mode="page"/>
    </style:style>
    <style:style style:name="表格12.A" style:family="table-column">
      <style:table-column-properties style:column-width="5.114cm"/>
    </style:style>
    <style:style style:name="表格12.B" style:family="table-column">
      <style:table-column-properties style:column-width="0.531cm"/>
    </style:style>
    <style:style style:name="表格12.C" style:family="table-column">
      <style:table-column-properties style:column-width="5.043cm"/>
    </style:style>
    <style:style style:name="表格12.E" style:family="table-column">
      <style:table-column-properties style:column-width="5.292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2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2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2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3" style:family="table">
      <style:table-properties style:width="16.51cm" fo:margin-left="0.012cm" fo:margin-top="0cm" fo:margin-bottom="0cm" table:align="left" style:writing-mode="page"/>
    </style:style>
    <style:style style:name="表格13.A" style:family="table-column">
      <style:table-column-properties style:column-width="5.503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4" style:family="table">
      <style:table-properties style:width="8.819cm" fo:margin-left="0.012cm" fo:margin-top="0cm" fo:margin-bottom="0cm" table:align="left" style:writing-mode="page"/>
    </style:style>
    <style:style style:name="表格14.A" style:family="table-column">
      <style:table-column-properties style:column-width="8.819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5" style:family="table">
      <style:table-properties style:width="16.51cm" fo:margin-left="0.012cm" fo:margin-top="0cm" fo:margin-bottom="0cm" table:align="left" style:writing-mode="page"/>
    </style:style>
    <style:style style:name="表格15.A" style:family="table-column">
      <style:table-column-properties style:column-width="7.761cm"/>
    </style:style>
    <style:style style:name="表格15.B" style:family="table-column">
      <style:table-column-properties style:column-width="0.986cm"/>
    </style:style>
    <style:style style:name="表格15.C" style:family="table-column">
      <style:table-column-properties style:column-width="7.76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6" style:family="table">
      <style:table-properties style:width="16.51cm" fo:margin-left="0.012cm" fo:margin-top="0cm" fo:margin-bottom="0cm" table:align="left" style:writing-mode="page"/>
    </style:style>
    <style:style style:name="表格16.A" style:family="table-column">
      <style:table-column-properties style:column-width="4.763cm"/>
    </style:style>
    <style:style style:name="表格16.B" style:family="table-column">
      <style:table-column-properties style:column-width="0.527cm"/>
    </style:style>
    <style:style style:name="表格16.C" style:family="table-column">
      <style:table-column-properties style:column-width="4.87cm"/>
    </style:style>
    <style:style style:name="表格16.E" style:family="table-column">
      <style:table-column-properties style:column-width="5.823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6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6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6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7" style:family="table">
      <style:table-properties style:width="8.819cm" fo:margin-left="0.012cm" fo:margin-top="0cm" fo:margin-bottom="0cm" table:align="left" style:writing-mode="page"/>
    </style:style>
    <style:style style:name="表格17.A" style:family="table-column">
      <style:table-column-properties style:column-width="8.819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8" style:family="table">
      <style:table-properties style:width="16.51cm" fo:margin-left="0.01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ad1f5" fo:padding-left="0.318cm" fo:padding-right="0.318cm" fo:padding-top="0.212cm" fo:padding-bottom="0.212cm" fo:border="0.75pt solid #4b0082">
        <style:background-image/>
      </style:table-cell-properties>
    </style:style>
    <style:style style:name="表格19" style:family="table">
      <style:table-properties style:width="16.51cm" fo:margin-left="0.012cm" fo:margin-top="0cm" fo:margin-bottom="0cm" table:align="left" style:writing-mode="page"/>
    </style:style>
    <style:style style:name="表格19.A" style:family="table-column">
      <style:table-column-properties style:column-width="1.411cm"/>
    </style:style>
    <style:style style:name="表格19.B" style:family="table-column">
      <style:table-column-properties style:column-width="8.042cm"/>
    </style:style>
    <style:style style:name="表格19.C" style:family="table-column">
      <style:table-column-properties style:column-width="7.057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0" style:family="table">
      <style:table-properties style:width="16.51cm" fo:margin-left="0.01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21" style:family="table">
      <style:table-properties style:width="16.51cm" fo:margin-left="0.012cm" fo:margin-top="0cm" fo:margin-bottom="0cm" table:align="left" style:writing-mode="page"/>
    </style:style>
    <style:style style:name="表格21.A" style:family="table-column">
      <style:table-column-properties style:column-width="4.232cm"/>
    </style:style>
    <style:style style:name="表格21.B" style:family="table-column">
      <style:table-column-properties style:column-width="6.138cm"/>
    </style:style>
    <style:style style:name="表格21.C" style:family="table-column">
      <style:table-column-properties style:column-width="6.14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2" style:family="table">
      <style:table-properties style:width="14.041cm" fo:margin-left="0.012cm" fo:margin-top="0cm" fo:margin-bottom="0cm" table:align="left" style:writing-mode="page"/>
    </style:style>
    <style:style style:name="表格22.A" style:family="table-column">
      <style:table-column-properties style:column-width="3.173cm"/>
    </style:style>
    <style:style style:name="表格22.B" style:family="table-column">
      <style:table-column-properties style:column-width="3.177cm"/>
    </style:style>
    <style:style style:name="表格22.C" style:family="table-column">
      <style:table-column-properties style:column-width="3.879cm"/>
    </style:style>
    <style:style style:name="表格22.D" style:family="table-column">
      <style:table-column-properties style:column-width="3.812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3" style:family="table">
      <style:table-properties style:width="16.51cm" fo:margin-left="0.012cm" fo:margin-top="0cm" fo:margin-bottom="0cm" table:align="left" style:writing-mode="page"/>
    </style:style>
    <style:style style:name="表格23.A" style:family="table-column">
      <style:table-column-properties style:column-width="3.879cm"/>
    </style:style>
    <style:style style:name="表格23.B" style:family="table-column">
      <style:table-column-properties style:column-width="4.586cm"/>
    </style:style>
    <style:style style:name="表格23.C" style:family="table-column">
      <style:table-column-properties style:column-width="8.045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4" style:family="table">
      <style:table-properties style:width="16.51cm" fo:margin-left="0.012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25" style:family="table">
      <style:table-properties style:width="16.51cm" fo:margin-left="0.01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26" style:family="table">
      <style:table-properties style:width="8.819cm" fo:margin-left="0.012cm" fo:margin-top="0cm" fo:margin-bottom="0cm" table:align="left" style:writing-mode="page"/>
    </style:style>
    <style:style style:name="表格26.A" style:family="table-column">
      <style:table-column-properties style:column-width="8.819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cccc" fo:padding-left="0.353cm" fo:padding-right="0.353cm" fo:padding-top="0.176cm" fo:padding-bottom="0.176cm" fo:border="0.75pt solid #c00000">
        <style:background-image/>
      </style:table-cell-properties>
    </style:style>
    <style:style style:name="表格27" style:family="table">
      <style:table-properties style:width="16.51cm" fo:margin-left="0.012cm" fo:margin-top="0cm" fo:margin-bottom="0cm" table:align="left" style:writing-mode="page"/>
    </style:style>
    <style:style style:name="表格27.A" style:family="table-column">
      <style:table-column-properties style:column-width="2.115cm"/>
    </style:style>
    <style:style style:name="表格27.B" style:family="table-column">
      <style:table-column-properties style:column-width="4.233cm"/>
    </style:style>
    <style:style style:name="表格27.C" style:family="table-column">
      <style:table-column-properties style:column-width="10.162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7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7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8" style:family="table">
      <style:table-properties style:width="16.51cm" fo:margin-left="0.01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2efda" fo:padding-left="0.353cm" fo:padding-right="0.353cm" fo:padding-top="0.176cm" fo:padding-bottom="0.176cm" fo:border="0.75pt solid #375623">
        <style:background-image/>
      </style:table-cell-properties>
    </style:style>
    <style:style style:name="表格29" style:family="table">
      <style:table-properties style:width="16.51cm" fo:margin-left="0.01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0" style:family="table">
      <style:table-properties style:width="16.51cm" fo:margin-left="0.012cm" fo:margin-top="0cm" fo:margin-bottom="0cm" table:align="left" style:writing-mode="page"/>
    </style:style>
    <style:style style:name="表格30.A" style:family="table-column">
      <style:table-column-properties style:column-width="2.646cm"/>
    </style:style>
    <style:style style:name="表格30.B" style:family="table-column">
      <style:table-column-properties style:column-width="5.292cm"/>
    </style:style>
    <style:style style:name="表格30.C" style:family="table-column">
      <style:table-column-properties style:column-width="2.644cm"/>
    </style:style>
    <style:style style:name="表格30.D" style:family="table-column">
      <style:table-column-properties style:column-width="5.9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1" style:family="table">
      <style:table-properties style:width="16.51cm" fo:margin-left="0.01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2" style:family="table">
      <style:table-properties style:width="16.51cm" fo:margin-left="0.012cm" fo:margin-top="0cm" fo:margin-bottom="0cm" table:align="left" style:writing-mode="page"/>
    </style:style>
    <style:style style:name="表格32.A" style:family="table-column">
      <style:table-column-properties style:column-width="4.232cm"/>
    </style:style>
    <style:style style:name="表格32.B" style:family="table-column">
      <style:table-column-properties style:column-width="8.045cm"/>
    </style:style>
    <style:style style:name="表格32.C" style:family="table-column">
      <style:table-column-properties style:column-width="4.23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3" style:family="table">
      <style:table-properties style:width="16.51cm" fo:margin-left="0.012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34" style:family="table">
      <style:table-properties style:width="16.51cm" fo:margin-left="0.012cm" fo:margin-top="0cm" fo:margin-bottom="0cm" table:align="left" style:writing-mode="page"/>
    </style:style>
    <style:style style:name="表格34.A" style:family="table-column">
      <style:table-column-properties style:column-width="4.408cm"/>
    </style:style>
    <style:style style:name="表格34.B" style:family="table-column">
      <style:table-column-properties style:column-width="3.175cm"/>
    </style:style>
    <style:style style:name="表格34.D" style:family="table-column">
      <style:table-column-properties style:column-width="5.752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5" style:family="table">
      <style:table-properties style:width="16.51cm" fo:margin-left="0.012cm" fo:margin-top="0cm" fo:margin-bottom="0cm" table:align="left" style:writing-mode="page"/>
    </style:style>
    <style:style style:name="表格35.A" style:family="table-column">
      <style:table-column-properties style:column-width="2.469cm"/>
    </style:style>
    <style:style style:name="表格35.B" style:family="table-column">
      <style:table-column-properties style:column-width="2.468cm"/>
    </style:style>
    <style:style style:name="表格35.D" style:family="table-column">
      <style:table-column-properties style:column-width="2.471cm"/>
    </style:style>
    <style:style style:name="表格35.E" style:family="table-column">
      <style:table-column-properties style:column-width="1.411cm"/>
    </style:style>
    <style:style style:name="表格35.F" style:family="table-column">
      <style:table-column-properties style:column-width="5.221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5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5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6" style:family="table">
      <style:table-properties style:width="16.51cm" fo:margin-left="0.01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37" style:family="table">
      <style:table-properties style:width="16.51cm" fo:margin-left="0.012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1f4e79" fo:padding-left="0.318cm" fo:padding-right="0.318cm" fo:padding-top="0.212cm" fo:padding-bottom="0.212cm" fo:border="0.75pt solid #1f4e79">
        <style:background-image/>
      </style:table-cell-properties>
    </style:style>
    <style:style style:name="表格38" style:family="table">
      <style:table-properties style:width="16.51cm" fo:margin-left="0.012cm" fo:margin-top="0cm" fo:margin-bottom="0cm" table:align="left" style:writing-mode="page"/>
    </style:style>
    <style:style style:name="表格38.A" style:family="table-column">
      <style:table-column-properties style:column-width="2.646cm"/>
    </style:style>
    <style:style style:name="表格38.B" style:family="table-column">
      <style:table-column-properties style:column-width="6.35cm"/>
    </style:style>
    <style:style style:name="表格38.C" style:family="table-column">
      <style:table-column-properties style:column-width="3.526cm"/>
    </style:style>
    <style:style style:name="表格38.D" style:family="table-column">
      <style:table-column-properties style:column-width="3.988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9" style:family="table">
      <style:table-properties style:width="16.51cm" fo:margin-left="0.012cm" fo:margin-top="0cm" fo:margin-bottom="0cm" table:align="left" style:writing-mode="page"/>
    </style:style>
    <style:style style:name="表格39.A" style:family="table-column">
      <style:table-column-properties style:column-width="1.411cm"/>
    </style:style>
    <style:style style:name="表格39.B" style:family="table-column">
      <style:table-column-properties style:column-width="4.584cm"/>
    </style:style>
    <style:style style:name="表格39.C" style:family="table-column">
      <style:table-column-properties style:column-width="5.644cm"/>
    </style:style>
    <style:style style:name="表格39.D" style:family="table-column">
      <style:table-column-properties style:column-width="4.87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0" style:family="table">
      <style:table-properties style:width="16.51cm" fo:margin-left="0.01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41" style:family="table">
      <style:table-properties style:width="16.51cm" fo:margin-left="0.01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48" style:family="table">
      <style:table-properties style:width="16.51cm" fo:margin-left="0cm" fo:margin-top="0cm" fo:margin-bottom="0cm" table:align="left" style:writing-mode="page"/>
    </style:style>
    <style:style style:name="表格48.A" style:family="table-column">
      <style:table-column-properties style:column-width="8.114cm"/>
    </style:style>
    <style:style style:name="表格48.B" style:family="table-column">
      <style:table-column-properties style:column-width="0.351cm"/>
    </style:style>
    <style:style style:name="表格48.C" style:family="table-column">
      <style:table-column-properties style:column-width="8.045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fff" fo:padding="0cm" fo:border="none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P1" style:family="paragraph" style:parent-style-name="Standard">
      <style:paragraph-properties fo:margin-top="2.54cm" fo:margin-bottom="0.353cm" style:contextual-spacing="false" fo:text-align="center" style:justify-single-word="false"/>
      <style:text-properties fo:color="#1f4e79" loext:opacity="100%"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/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P3" style:family="paragraph" style:parent-style-name="Standard">
      <style:paragraph-properties fo:margin-top="0cm" fo:margin-bottom="0.353cm" style:contextual-spacing="false" fo:text-align="center" style:justify-single-word="false"/>
      <style:text-properties fo:color="#595959" loext:opacity="100%" style:font-name="Arial" fo:font-size="14pt" style:font-name-asian="Arial2" style:font-size-asian="14pt" style:font-name-complex="Arial2" style:font-size-complex="14pt"/>
    </style:style>
    <style:style style:name="P4" style:family="paragraph" style:parent-style-name="Standard">
      <style:paragraph-properties fo:margin-top="1.058cm" fo:margin-bottom="0cm" style:contextual-spacing="false" fo:text-align="center" style:justify-single-word="false" fo:padding-left="0cm" fo:padding-right="0cm" fo:padding-top="0.141cm" fo:padding-bottom="0cm" fo:border-left="none" fo:border-right="none" fo:border-top="0.99pt solid #2e75b6" fo:border-bottom="none"/>
    </style:style>
    <style:style style:name="P5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6" style:family="paragraph" style:parent-style-name="Standard">
      <style:paragraph-properties fo:margin-top="0.106cm" fo:margin-bottom="0.141cm" style:contextual-spacing="false"/>
    </style:style>
    <style:style style:name="P7" style:family="paragraph" style:parent-style-name="Standard">
      <style:paragraph-properties fo:margin-top="0.106cm" fo:margin-bottom="0.106cm" style:contextual-spacing="false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name-asian="Arial2" style:font-size-asian="10pt" style:font-name-complex="Arial2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background-color="#ffff00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ff3d00" loext:opacity="100%" style:font-name="Arial" fo:font-size="10pt" fo:font-weight="bold" fo:background-color="#64ffda" style:font-name-asian="Arial2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f1744" style:font-name-asian="Arial2" style:font-size-asian="10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 fo:margin-top="0.212cm" fo:margin-bottom="0.106cm" style:contextual-spacing="false"/>
    </style:style>
    <style:style style:name="P15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6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officeooo:paragraph-rsid="000ee922" style:font-name-asian="Arial2" style:font-size-asian="16pt" style:font-weight-asian="bold" style:font-name-complex="Arial2" style:font-size-complex="16pt" style:font-weight-complex="bold"/>
    </style:style>
    <style:style style:name="P17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18" style:family="paragraph" style:parent-style-name="Standard">
      <style:paragraph-properties fo:margin-top="0.106cm" fo:margin-bottom="0.106cm" style:contextual-spacing="false"/>
      <style:text-properties officeooo:paragraph-rsid="000ee922"/>
    </style:style>
    <style:style style:name="P19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20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0ee922" style:font-name-asian="Arial2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officeooo:paragraph-rsid="000ee922" fo:background-color="#f50057" style:font-name-asian="Arial2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officeooo:paragraph-rsid="000ee922" style:font-name-asian="Arial2" style:font-size-asian="10pt" style:font-name-complex="Arial2" style:font-size-complex="10pt"/>
    </style:style>
    <style:style style:name="P24" style:family="paragraph" style:parent-style-name="Standard">
      <style:paragraph-properties fo:text-align="center" style:justify-single-word="false"/>
      <style:text-properties fo:color="#f50057" loext:opacity="100%" style:font-name="Arial" fo:font-size="10pt" fo:font-weight="bold" officeooo:paragraph-rsid="000ee922" fo:background-color="#64ffda" style:font-name-asian="Arial2" style:font-size-asian="10pt" style:font-weight-asian="bold" style:font-name-complex="Arial2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0ee922" fo:background-color="#d500f9" style:font-name-asian="Arial2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27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0ee922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top="0.071cm" fo:margin-bottom="0.071cm" style:contextual-spacing="false"/>
      <style:text-properties officeooo:paragraph-rsid="000ee922"/>
    </style:style>
    <style:style style:name="P29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30" style:family="paragraph" style:parent-style-name="Standard">
      <style:paragraph-properties fo:margin-top="0.212cm" fo:margin-bottom="0.106cm" style:contextual-spacing="false"/>
      <style:text-properties officeooo:paragraph-rsid="000ee922"/>
    </style:style>
    <style:style style:name="P31" style:family="paragraph" style:parent-style-name="Standard">
      <style:paragraph-properties fo:margin-top="0cm" fo:margin-bottom="0.071cm" style:contextual-spacing="false" fo:text-align="center" style:justify-single-word="false"/>
      <style:text-properties fo:color="#1f4e7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32" style:family="paragraph" style:parent-style-name="Standard">
      <style:paragraph-properties fo:margin-top="0.106cm" fo:margin-bottom="0.141cm" style:contextual-spacing="false"/>
      <style:text-properties officeooo:paragraph-rsid="000ee922"/>
    </style:style>
    <style:style style:name="P33" style:family="paragraph" style:parent-style-name="Standard">
      <style:paragraph-properties fo:text-align="center" style:justify-single-word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34" style:family="paragraph" style:parent-style-name="Standard">
      <style:paragraph-properties fo:margin-top="0.141cm" fo:margin-bottom="0.106cm" style:contextual-spacing="false"/>
      <style:text-properties officeooo:paragraph-rsid="000ee922"/>
    </style:style>
    <style:style style:name="P35" style:family="paragraph" style:parent-style-name="Standard">
      <style:paragraph-properties fo:margin-top="0.071cm" fo:margin-bottom="0cm" style:contextual-spacing="false"/>
      <style:text-properties officeooo:paragraph-rsid="000ee922"/>
    </style:style>
    <style:style style:name="P36" style:family="paragraph" style:parent-style-name="Standard">
      <style:paragraph-properties fo:margin-top="0.106cm" fo:margin-bottom="0.141cm" style:contextual-spacing="false"/>
      <style:text-properties fo:color="#006064" loext:opacity="100%" style:font-name="Arial" fo:font-size="11pt" officeooo:paragraph-rsid="000ee922" style:font-name-asian="Arial2" style:font-size-asian="11pt" style:font-name-complex="Arial2" style:font-size-complex="11pt"/>
    </style:style>
    <style:style style:name="P37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d740" style:font-name-asian="Arial2" style:font-size-asian="10pt" style:font-weight-asian="bold" style:font-name-complex="Arial2" style:font-size-complex="10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ff00" style:font-name-asian="Arial2" style:font-size-asian="10pt" style:font-weight-asian="bold" style:font-name-complex="Arial2" style:font-size-complex="10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41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9pt" officeooo:paragraph-rsid="000ee922" style:font-name-asian="Arial2" style:font-size-asian="9pt" style:font-name-complex="Arial2" style:font-size-complex="9pt"/>
    </style:style>
    <style:style style:name="P42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9pt" officeooo:paragraph-rsid="000ee922" style:font-name-asian="Arial2" style:font-size-asian="9pt" style:font-name-complex="Arial2" style:font-size-complex="9pt"/>
    </style:style>
    <style:style style:name="P43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59595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45" style:family="paragraph" style:parent-style-name="Standard">
      <style:text-properties officeooo:paragraph-rsid="000ee922"/>
    </style:style>
    <style:style style:name="P46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47" style:family="paragraph" style:parent-style-name="Standard">
      <style:paragraph-properties fo:margin-top="0.106cm" fo:margin-bottom="0.14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48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P49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50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51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920b5" style:font-name-asian="Arial2" style:font-size-asian="11pt" style:font-weight-asian="bold" style:font-name-complex="Arial2" style:font-size-complex="11pt" style:font-weight-complex="bold"/>
    </style:style>
    <style:style style:name="P52" style:family="paragraph" style:parent-style-name="Standard">
      <style:paragraph-properties fo:margin-top="0.106cm" fo:margin-bottom="0.106cm" style:contextual-spacing="false"/>
      <style:text-properties officeooo:paragraph-rsid="004920b5"/>
    </style:style>
    <style:style style:name="P53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4920b5" style:font-name-asian="Arial2" style:font-size-asian="10pt" style:font-weight-asian="bold" style:font-name-complex="Arial2" style:font-size-complex="10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Arial" fo:font-size="10pt" officeooo:paragraph-rsid="004920b5" style:font-name-asian="Arial2" style:font-size-asian="10pt" style:font-name-complex="Arial2" style:font-size-complex="10pt"/>
    </style:style>
    <style:style style:name="P55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4920b5" fo:background-color="#000000" style:font-name-asian="Arial2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57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58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4fb9a3" style:font-name-asian="Courier New1" style:font-size-asian="10pt" style:font-name-complex="Courier New1" style:font-size-complex="10pt"/>
    </style:style>
    <style:style style:name="P59" style:family="paragraph" style:parent-style-name="Standard">
      <style:paragraph-properties fo:margin-top="0.106cm" fo:margin-bottom="0.141cm" style:contextual-spacing="false"/>
      <style:text-properties officeooo:paragraph-rsid="004fb9a3"/>
    </style:style>
    <style:style style:name="P60" style:family="paragraph" style:parent-style-name="Standard">
      <style:paragraph-properties fo:margin-top="0.106cm" fo:margin-bottom="0.106cm" style:contextual-spacing="false"/>
      <style:text-properties officeooo:paragraph-rsid="004fb9a3"/>
    </style:style>
    <style:style style:name="P61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4fb9a3" style:font-name-asian="Arial2" style:font-size-asian="11pt" style:font-name-complex="Arial2" style:font-size-complex="11pt"/>
    </style:style>
    <style:style style:name="P62" style:family="paragraph" style:parent-style-name="Standard">
      <style:paragraph-properties fo:margin-top="0.071cm" fo:margin-bottom="0.071cm" style:contextual-spacing="false"/>
      <style:text-properties officeooo:paragraph-rsid="004fb9a3"/>
    </style:style>
    <style:style style:name="P63" style:family="paragraph" style:parent-style-name="Standard">
      <style:paragraph-properties fo:text-align="center" style:justify-single-word="false"/>
      <style:text-properties officeooo:paragraph-rsid="004fb9a3"/>
    </style:style>
    <style:style style:name="P64" style:family="paragraph" style:parent-style-name="Standard">
      <style:paragraph-properties fo:margin-top="0.071cm" fo:margin-bottom="0.106cm" style:contextual-spacing="false"/>
      <style:text-properties officeooo:paragraph-rsid="004fb9a3"/>
    </style:style>
    <style:style style:name="P65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7" style:family="paragraph" style:parent-style-name="Standard">
      <style:paragraph-properties fo:margin-top="0.282cm" fo:margin-bottom="0cm" style:contextual-spacing="false" fo:text-align="center" style:justify-single-word="false"/>
      <style:text-properties fo:color="#7f6000" loext:opacity="100%" style:font-name="Arial" fo:font-size="14pt" fo:font-weight="bold" officeooo:paragraph-rsid="004fb9a3" style:font-name-asian="Arial2" style:font-size-asian="14pt" style:font-weight-asian="bold" style:font-name-complex="Arial2" style:font-size-complex="14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9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1f4e79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/>
      <style:text-properties fo:color="#006064" loext:opacity="100%" style:font-name="Arial" fo:font-size="11pt" style:font-name-asian="Arial2" style:font-size-asian="11pt" style:font-name-complex="Arial2" style:font-size-complex="11pt"/>
    </style:style>
    <style:style style:name="P71" style:family="paragraph" style:parent-style-name="Standard">
      <style:paragraph-properties fo:margin-top="0.176cm" fo:margin-bottom="0.106cm" style:contextual-spacing="false"/>
    </style:style>
    <style:style style:name="P72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4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6" style:family="paragraph" style:parent-style-name="Standard">
      <style:paragraph-properties fo:margin-top="0.318cm" fo:margin-bottom="0cm" style:contextual-spacing="false" fo:text-align="center" style:justify-single-word="false"/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8" style:family="paragraph" style:parent-style-name="Standard">
      <style:paragraph-properties fo:margin-top="0.141cm" fo:margin-bottom="0.106cm" style:contextual-spacing="false"/>
    </style:style>
    <style:style style:name="P79" style:family="paragraph" style:parent-style-name="List_20_Paragraph" style:list-style-name="WWNum3">
      <style:paragraph-properties fo:margin-top="0.071cm" fo:margin-bottom="0.071cm" style:contextual-spacing="false"/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P80" style:family="paragraph" style:parent-style-name="Standard">
      <style:paragraph-properties fo:margin-top="0.423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81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82" style:family="paragraph" style:parent-style-name="List_20_Paragraph" style:list-style-name="WWNum3">
      <style:paragraph-properties fo:margin-top="0.071cm" fo:margin-bottom="0.071cm" style:contextual-spacing="false"/>
    </style:style>
    <style:style style:name="P83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c000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1f4e79" loext:opacity="100%" style:font-name="Arial" fo:font-size="11pt" style:font-name-asian="Arial2" style:font-size-asian="11pt" style:font-name-complex="Arial2" style:font-size-complex="11pt"/>
    </style:style>
    <style:style style:name="P86" style:family="paragraph" style:parent-style-name="Standard">
      <style:paragraph-properties fo:margin-top="0.071cm" fo:margin-bottom="0cm" style:contextual-spacing="false"/>
    </style:style>
    <style:style style:name="P87" style:family="paragraph" style:parent-style-name="Heading_20_2">
      <style:paragraph-properties fo:margin-top="0.423cm" fo:margin-bottom="0.141cm" style:contextual-spacing="false"/>
      <style:text-properties fo:color="#375623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c00000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ffffff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7f6000" loext:opacity="100%" style:font-name="Courier New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91" style:family="paragraph" style:parent-style-name="Standard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2" style:family="paragraph" style:parent-style-name="Standard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3" style:family="paragraph" style:parent-style-name="Standard"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4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5" style:family="paragraph" style:parent-style-name="Standard">
      <style:text-properties fo:color="#4b008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6" style:family="paragraph" style:parent-style-name="Standard">
      <style:text-properties fo:color="#0060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7" style:family="paragraph" style:parent-style-name="Standard">
      <style:paragraph-properties fo:margin-top="0.423cm" fo:margin-bottom="0cm" style:contextual-spacing="false" fo:text-align="center" style:justify-single-word="false" fo:padding-left="0cm" fo:padding-right="0cm" fo:padding-top="0.141cm" fo:padding-bottom="0cm" fo:border-left="none" fo:border-right="none" fo:border-top="0.74pt solid #2e75b6" fo:border-bottom="non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" style:family="text">
      <style:text-properties style:font-name="Arial" fo:font-size="11pt" style:font-name-asian="Arial2" style:font-size-asian="11pt" style:font-name-complex="Arial2" style:font-size-complex="11pt"/>
    </style:style>
    <style:style style:name="T2" style:family="text"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" style:family="text">
      <style:text-properties style:font-name="Arial" fo:font-size="11pt" fo:background-color="#eeff41" loext:char-shading-value="0" style:font-name-asian="Arial2" style:font-size-asian="11pt" style:font-name-complex="Arial2" style:font-size-complex="11pt"/>
    </style:style>
    <style:style style:name="T6" style:family="text">
      <style:text-properties style:font-name="Arial" fo:font-size="11pt" fo:background-color="#1de9b6" loext:char-shading-value="0" style:font-name-asian="Arial2" style:font-size-asian="11pt" style:font-name-complex="Arial2" style:font-size-complex="11pt"/>
    </style:style>
    <style:style style:name="T7" style:family="text">
      <style:text-properties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style:font-name="Arial" fo:font-size="11pt" fo:background-color="#ffd740" loext:char-shading-value="0" style:font-name-asian="Arial2" style:font-size-asian="11pt" style:font-name-complex="Arial2" style:font-size-complex="11pt"/>
    </style:style>
    <style:style style:name="T9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fo:color="#76ff03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ff3d00" loext:opacity="100%" fo:background-color="#64ffda" loext:char-shading-value="0"/>
    </style:style>
    <style:style style:name="T12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3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5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16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17" style:family="text">
      <style:text-properties fo:background-color="#00e676" loext:char-shading-value="0"/>
    </style:style>
    <style:style style:name="T18" style:family="text">
      <style:text-properties fo:background-color="#ffd740" loext:char-shading-value="0"/>
    </style:style>
    <style:style style:name="T19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0" style:family="text"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T21" style:family="text">
      <style:text-properties fo:color="#c00000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22" style:family="text">
      <style:text-properties fo:color="#ff3d00" loext:opacity="100%" style:font-name="Arial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23" style:family="text">
      <style:text-properties fo:color="#ffd740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4" style:family="text">
      <style:text-properties fo:color="#c6ff00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25" style:family="text">
      <style:text-properties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26" style:family="text">
      <style:text-properties fo:color="#c6ff00" loext:opacity="100%" fo:background-color="#d500f9" loext:char-shading-value="0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29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30" style:family="text">
      <style:text-properties fo:color="#18ffff" loext:opacity="100%" fo:background-color="#d500f9" loext:char-shading-value="0"/>
    </style:style>
    <style:style style:name="T31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32" style:family="text">
      <style:text-properties fo:font-weight="bold" fo:background-color="#ffd740" loext:char-shading-value="0" style:font-weight-asian="bold" style:font-weight-complex="bold"/>
    </style:style>
    <style:style style:name="T33" style:family="text">
      <style:text-properties fo:background-color="#ffff00" loext:char-shading-value="0"/>
    </style:style>
    <style:style style:name="T34" style:family="text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5" style:family="text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6" style:family="text">
      <style:text-properties fo:color="#000000" loext:opacity="100%" style:font-name="Arial" fo:font-size="11pt" style:font-name-asian="Arial2" style:font-size-asian="11pt" style:font-name-complex="Arial2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資料結構</text:p>
      <text:p text:style-name="P2">BST・AVL・Red-Black Tree・Heap</text:p>
      <text:p text:style-name="P3">高普考・地特・關務 完整學習筆記</text:p>
      <text:p text:style-name="P4"/>
      <text:p text:style-name="Standard"/>
      <text:h text:style-name="P5" text:outline-level="1">一、三種樹結構總覽</text:h>
      <text:p text:style-name="P6"><text:span text:style-name="T1">本筆記涵蓋公職考試資料結構中最常出現的三種樹：</text:span><text:span text:style-name="T2">BST（二元搜尋樹）</text:span><text:span text:style-name="T1">、</text:span><text:span text:style-name="T2">AVL Tree（平衡二元搜尋樹）</text:span><text:span text:style-name="T1"> 以及 </text:span><text:span text:style-name="T2">Red-Black Tree（紅黑樹）</text:span><text:span text:style-name="T1">。三者都以 BST 為基礎，但各有不同的平衡策略，適用場景也不同。</text:span></text:p>
      <text:p text:style-name="P7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C"/>
        <table:table-column table:style-name="表格1.F"/>
        <table:table-row table:style-name="表格1.1">
          <table:table-cell table:style-name="表格1.A1" office:value-type="string">
            <text:p text:style-name="P8">結構</text:p>
          </table:table-cell>
          <table:table-cell table:style-name="表格1.A1" office:value-type="string">
            <text:p text:style-name="P8">最擅長</text:p>
          </table:table-cell>
          <table:table-cell table:style-name="表格1.A1" office:value-type="string">
            <text:p text:style-name="P8">搜尋</text:p>
          </table:table-cell>
          <table:table-cell table:style-name="表格1.A1" office:value-type="string">
            <text:p text:style-name="P8">插入</text:p>
          </table:table-cell>
          <table:table-cell table:style-name="表格1.A1" office:value-type="string">
            <text:p text:style-name="P8">刪除</text:p>
          </table:table-cell>
          <table:table-cell table:style-name="表格1.A1" office:value-type="string">
            <text:p text:style-name="P8">最差情況</text:p>
          </table:table-cell>
        </table:table-row>
        <table:table-row table:style-name="表格1.1">
          <table:table-cell table:style-name="表格1.A2" office:value-type="string">
            <text:p text:style-name="P9">BST</text:p>
          </table:table-cell>
          <table:table-cell table:style-name="表格1.A2" office:value-type="string">
            <text:p text:style-name="P9">快速搜尋（但不穩定）</text:p>
          </table:table-cell>
          <table:table-cell table:style-name="表格1.A2" office:value-type="string">
            <text:p text:style-name="P9"><text:span text:style-name="T3">O(log n) </text:span>平均</text:p>
          </table:table-cell>
          <table:table-cell table:style-name="表格1.A2" office:value-type="string">
            <text:p text:style-name="P9"><text:span text:style-name="T3">O(log n)</text:span> 平均</text:p>
          </table:table-cell>
          <table:table-cell table:style-name="表格1.A2" office:value-type="string">
            <text:p text:style-name="P9"><text:span text:style-name="T3">O(log n) </text:span>平均</text:p>
          </table:table-cell>
          <table:table-cell table:style-name="表格1.A2" office:value-type="string">
            <text:p text:style-name="P9"><text:span text:style-name="T4">O(n) </text:span>退化</text:p>
          </table:table-cell>
        </table:table-row>
        <table:table-row table:style-name="表格1.1">
          <table:table-cell table:style-name="表格1.A3" office:value-type="string">
            <text:p text:style-name="P9">AVL</text:p>
          </table:table-cell>
          <table:table-cell table:style-name="表格1.A3" office:value-type="string">
            <text:p text:style-name="P9">查詢最快（嚴格平衡）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</table:table-row>
        <table:table-row table:style-name="表格1.1">
          <table:table-cell table:style-name="表格1.A2" office:value-type="string">
            <text:p text:style-name="P9">Red-Black Tree</text:p>
          </table:table-cell>
          <table:table-cell table:style-name="表格1.A2" office:value-type="string">
            <text:p text:style-name="P9">插入/刪除較快</text:p>
          </table:table-cell>
          <table:table-cell table:style-name="表格1.A2" office:value-type="string">
            <text:p text:style-name="P10">O(log n)</text:p>
          </table:table-cell>
          <table:table-cell table:style-name="表格1.A2" office:value-type="string">
            <text:p text:style-name="P10">O(log n)</text:p>
          </table:table-cell>
          <table:table-cell table:style-name="表格1.A2" office:value-type="string">
            <text:p text:style-name="P10">O(log n)</text:p>
          </table:table-cell>
          <table:table-cell table:style-name="表格1.A2" office:value-type="string">
            <text:p text:style-name="P10">O(log n)</text:p>
          </table:table-cell>
        </table:table-row>
        <table:table-row table:style-name="表格1.1">
          <table:table-cell table:style-name="表格1.A3" office:value-type="string">
            <text:p text:style-name="P11">Heap</text:p>
          </table:table-cell>
          <table:table-cell table:style-name="表格1.A3" office:value-type="string">
            <text:p text:style-name="P9">找最大 / 最小值</text:p>
          </table:table-cell>
          <table:table-cell table:style-name="表格1.A3" office:value-type="string">
            <text:p text:style-name="P12">O(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</table:table-row>
        <table:table-row table:style-name="表格1.1">
          <table:table-cell table:style-name="表格1.A2" office:value-type="string">
            <text:p text:style-name="P9">Hash Table</text:p>
          </table:table-cell>
          <table:table-cell table:style-name="表格1.A2" office:value-type="string">
            <text:p text:style-name="P9">快速查詢（平均）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13">O(n) 碰撞</text:p>
          </table:table-cell>
        </table:table-row>
      </table:table>
      <text:p text:style-name="P14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5">⚡ 核心差異一句話記憶</text:p>
            <text:p text:style-name="P6"><text:span text:style-name="T2">BST：</text:span><text:span text:style-name="T1">左小右大，可能退化成 O(n)</text:span></text:p>
            <text:p text:style-name="P6"><text:span text:style-name="T2">AVL：</text:span><text:span text:style-name="T5">強制平衡</text:span><text:span text:style-name="T1">（</text:span><text:span text:style-name="T6">BF 介於 -1~1</text:span><text:span text:style-name="T1">），查找最快</text:span></text:p>
            <text:p text:style-name="P6"><text:span text:style-name="T2">RBT：</text:span><text:span text:style-name="T5">用紅黑規則維持平衡</text:span><text:span text:style-name="T1">，</text:span><text:span text:style-name="T7">插入/刪除旋轉次數</text:span><text:span text:style-name="T8">少於 AVL</text:span></text:p>
            <text:p text:style-name="P6"><text:span text:style-name="T2">Heap：</text:span><text:span text:style-name="T9">不是搜尋樹</text:span><text:span text:style-name="T1">，</text:span><text:span text:style-name="T10">專門快速取出最大值或最小值</text:span></text:p>
          </table:table-cell>
        </table:table-row>
      </table:table>
      <text:p text:style-name="P7"/>
      <text:p text:style-name="Standard"/>
      <text:h text:style-name="P16" text:outline-level="1">一之一、深入理解：為什麼是 O(log n)？</text:h>
      <text:p text:style-name="P17">很多初學者看到 BST、AVL、RBT、Heap 的時間複雜度都是 O(log n)，直覺認為「應該都是每次砍掉一半吧？」這個想法非常接近核心，但需要做一個重要的區分。</text:p>
      <text:p text:style-name="P18"/>
      <text:h text:style-name="P19" text:outline-level="2">1.1 三種結構的從屬關係</text:h>
      <text:p text:style-name="P20">先釐清一個容易混淆的問題：AVL、RBT 是 BST，但<text:span text:style-name="T11"> Heap 不是 BST</text:span>。</text:p>
      <text:p text:style-name="P18"/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office:value-type="string">
            <text:p text:style-name="P21">結構</text:p>
          </table:table-cell>
          <table:table-cell table:style-name="表格49.A1" office:value-type="string">
            <text:p text:style-name="P21">是 BST 嗎？</text:p>
          </table:table-cell>
          <table:table-cell table:style-name="表格49.A1" office:value-type="string">
            <text:p text:style-name="P21">判斷依據</text:p>
          </table:table-cell>
          <table:table-cell table:style-name="表格49.A1" office:value-type="string">
            <text:p text:style-name="P22">O(log n) 的來源</text:p>
          </table:table-cell>
        </table:table-row>
        <table:table-row table:style-name="表格49.1">
          <table:table-cell table:style-name="表格49.A2" office:value-type="string">
            <text:p text:style-name="P23">BST</text:p>
          </table:table-cell>
          <table:table-cell table:style-name="表格49.A2" office:value-type="string">
            <text:p text:style-name="P23">✓ 是（BST 本身）</text:p>
          </table:table-cell>
          <table:table-cell table:style-name="表格49.C2" office:value-type="string">
            <text:p text:style-name="P24">左 &lt; 根 &lt; 右</text:p>
          </table:table-cell>
          <table:table-cell table:style-name="表格49.A2" office:value-type="string">
            <text:p text:style-name="P23">每次搜尋<text:span text:style-name="T12">排除半棵樹</text:span></text:p>
          </table:table-cell>
        </table:table-row>
        <table:table-row table:style-name="表格49.1">
          <table:table-cell table:style-name="表格49.A3" office:value-type="string">
            <text:p text:style-name="P23">AVL Tree</text:p>
          </table:table-cell>
          <table:table-cell table:style-name="表格49.A3" office:value-type="string">
            <text:p text:style-name="P23">✓ 是（BST 的一種）</text:p>
          </table:table-cell>
          <table:table-cell table:style-name="表格49.A3" office:value-type="string">
            <text:p text:style-name="P23">BST 規則 + |BF| ≤ 1</text:p>
          </table:table-cell>
          <table:table-cell table:style-name="表格49.A3" office:value-type="string">
            <text:p text:style-name="P23">每次<text:span text:style-name="T12">排除半棵樹</text:span>＋<text:span text:style-name="T3">強制平衡</text:span>不退化</text:p>
          </table:table-cell>
        </table:table-row>
        <table:table-row table:style-name="表格49.1">
          <table:table-cell table:style-name="表格49.A2" office:value-type="string">
            <text:p text:style-name="P23">Red-Black Tree</text:p>
          </table:table-cell>
          <table:table-cell table:style-name="表格49.A2" office:value-type="string">
            <text:p text:style-name="P23">✓ 是（BST 的一種）</text:p>
          </table:table-cell>
          <table:table-cell table:style-name="表格49.A2" office:value-type="string">
            <text:p text:style-name="P23">BST 規則 + 五條顏色規則</text:p>
          </table:table-cell>
          <table:table-cell table:style-name="表格49.A2" office:value-type="string">
            <text:p text:style-name="P23">每次<text:span text:style-name="T12">排除半棵樹</text:span>＋<text:span text:style-name="T3">顏色規則</text:span>不退化</text:p>
          </table:table-cell>
        </table:table-row>
        <table:table-row table:style-name="表格49.1">
          <table:table-cell table:style-name="表格49.A3" office:value-type="string">
            <text:p text:style-name="P23">Heap</text:p>
          </table:table-cell>
          <table:table-cell table:style-name="表格49.A3" office:value-type="string">
            <text:p text:style-name="P23">✗ 不是！</text:p>
          </table:table-cell>
          <table:table-cell table:style-name="表格49.A3" office:value-type="string">
            <text:p text:style-name="P25">只要求父 ≥ 子（或父 ≤ 子）</text:p>
          </table:table-cell>
          <table:table-cell table:style-name="表格49.A3" office:value-type="string">
            <text:p text:style-name="P23"><text:span text:style-name="T13">完全二元樹的高度</text:span><text:span text:style-name="T4">本身是 log n</text:span></text:p>
          </table:table-cell>
        </table:table-row>
      </table:table>
      <text:p text:style-name="P18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26">⚠️ 為什麼 Heap 不是 BST？</text:p>
            <text:p text:style-name="P17"><text:span text:style-name="T14">BST 要求「左子樹所有節點 &lt; 根 &lt; 右子樹所有節點」</text:span>，是對節點間大小關係的嚴格規定。</text:p>
            <text:p text:style-name="P17">但 <text:span text:style-name="T4">Heap 只要求「父節點 ≥（或 ≤）子節點」</text:span>，<text:span text:style-name="T15">兄弟節點之間完全沒有大小限制</text:span>。</text:p>
            <text:p text:style-name="P17">例如以下是合法的 Max Heap，卻完全不是 BST：</text:p>
            <table:table table:name="表格51" table:style-name="表格51">
              <table:table-column table:style-name="表格51.A"/>
              <table:table-row table:style-name="表格51.1">
                <table:table-cell table:style-name="表格51.A1" office:value-type="string">
                  <text:p text:style-name="P27"><text:s text:c="8"/>100</text:p>
                  <text:p text:style-name="P27"><text:s text:c="7"/>/ <text:s text:c="2"/>\</text:p>
                  <text:p text:style-name="P27"><text:s text:c="6"/>80 <text:s text:c="3"/>70 <text:s text:c="2"/>← <text:span text:style-name="T3">80 和 70 之間無大小限制（✓ Heap）</text:span></text:p>
                  <text:p text:style-name="P27"><text:s text:c="5"/>/ \</text:p>
                  <text:p text:style-name="P27"><text:s text:c="4"/>20 <text:s/>40 <text:s text:c="2"/>← <text:span text:style-name="T16">70 在根的右邊，但 70 &lt; 100</text:span>（✗ BST 規定右子必 &gt; 根不適用此位置規則）</text:p>
                </table:table-cell>
              </table:table-row>
            </table:table>
            <text:p text:style-name="P28"/>
            <text:p text:style-name="P29">結論：<text:span text:style-name="T17">BST 管的是「大小關係」</text:span>；<text:span text:style-name="T18">Heap 管的是「父子關係」</text:span>。兩者根本不同。</text:p>
          </table:table-cell>
        </table:table-row>
      </table:table>
      <text:p text:style-name="P30"/>
      <text:h text:style-name="P19" text:outline-level="2">1.2 BST / AVL / RBT 的 O(log n)：每次排除半棵樹</text:h>
      <text:p text:style-name="P17">搜尋時，<text:span text:style-name="T3">BST 的「左 &lt; 根 &lt; 右」規則</text:span>使得<text:span text:style-name="T14">每次比較都能排除整整一半的節點</text:span>，這<text:span text:style-name="T19">與二元搜尋（Binary Search）的原理完全相同</text:span>：</text:p>
      <text:p text:style-name="P18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31">搜尋 70 的過程：</text:p>
            <text:p text:style-name="P27"><text:s text:c="8"/>50 <text:s text:c="7"/>← 70 &gt; 50，<text:span text:style-name="T3">排除左半邊</text:span>（含 30, 20, 40）</text:p>
            <text:p text:style-name="P27"><text:s text:c="7"/>/ <text:s/>\</text:p>
            <text:p text:style-name="P32"><text:soft-page-break/><text:span text:style-name="T20"><text:s text:c="5"/>30 <text:s text:c="3"/>80 <text:s text:c="4"/>← 70 &lt; 80，</text:span><text:span text:style-name="T21">排除右半邊</text:span><text:span text:style-name="T20">（含 90）</text:span></text:p>
            <text:p text:style-name="P27"><text:s text:c="4"/>/ \ <text:s text:c="2"/>/ \</text:p>
            <text:p text:style-name="P27"><text:s text:c="3"/>20 40 70 <text:s/>90 <text:s text:c="2"/>← 找到！</text:p>
            <text:p text:style-name="P28"/>
            <text:p text:style-name="P33"><text:span text:style-name="T16">每一步都把搜尋範圍縮小一半</text:span>，故<text:span text:style-name="T12">高度 = O(log n)，搜尋 = O(log n)</text:span></text:p>
          </table:table-cell>
        </table:table-row>
      </table:table>
      <text:p text:style-name="P34"/>
      <text:p text:style-name="P32"><text:span text:style-name="T2">AVL 和 RBT 的關鍵優勢：</text:span><text:span text:style-name="T22">普通 BST 若資料有序插入</text:span><text:span text:style-name="T1">（如 1, 2, 3, 4...），</text:span><text:span text:style-name="T9">樹會退化成右斜鏈結串列，搜尋變成 </text:span><text:span text:style-name="T23">O(n)</text:span><text:span text:style-name="T1">。AVL 和 RBT </text:span><text:span text:style-name="T9">透過各自的平衡機制，保證樹不退化</text:span><text:span text:style-name="T1">，</text:span><text:span text:style-name="T24">讓「每次排除半棵樹」的前提永遠成立</text:span><text:span text:style-name="T1">，搜尋始終</text:span><text:span text:style-name="T25">維持 O(log n)</text:span><text:span text:style-name="T1">。</text:span></text:p>
      <text:p text:style-name="P18"/>
      <text:h text:style-name="P19" text:outline-level="2">1.3 Heap 的 <text:span text:style-name="T26">O(log n)：來自完全二元樹的高度</text:span></text:h>
      <text:p text:style-name="P17"><text:span text:style-name="T14">Heap 的 O(log n) 有完全不同的來源</text:span>，不是「每次排除半棵資料」，而是<text:span text:style-name="T27">「樹本身的高度剛好是 log n」</text:span>：</text:p>
      <text:p text:style-name="P18"/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21">操作</text:p>
          </table:table-cell>
          <table:table-cell table:style-name="表格53.A1" office:value-type="string">
            <text:p text:style-name="P21">過程</text:p>
          </table:table-cell>
          <table:table-cell table:style-name="表格53.A1" office:value-type="string">
            <text:p text:style-name="P21">為什麼是 O(log n)？</text:p>
          </table:table-cell>
        </table:table-row>
        <table:table-row table:style-name="表格53.1">
          <table:table-cell table:style-name="表格53.A2" office:value-type="string">
            <text:p text:style-name="P23">插入（Up-Heap）</text:p>
          </table:table-cell>
          <table:table-cell table:style-name="表格53.A2" office:value-type="string">
            <text:p text:style-name="P23">新元素放最後 → 與父節點比較 → 若違規則往上交換，重複直到合法</text:p>
          </table:table-cell>
          <table:table-cell table:style-name="表格53.A2" office:value-type="string">
            <text:p text:style-name="P23"><text:span text:style-name="T28">最多往上走「樹高」層</text:span>，樹高 = log n</text:p>
          </table:table-cell>
        </table:table-row>
        <table:table-row table:style-name="表格53.1">
          <table:table-cell table:style-name="表格53.A3" office:value-type="string">
            <text:p text:style-name="P23">刪除最大值（Down-Heap）</text:p>
          </table:table-cell>
          <table:table-cell table:style-name="表格53.A3" office:value-type="string">
            <text:p text:style-name="P23">移除根 → 末端元素移至根 → 與較大子節點比較 → 若違規則往下交換</text:p>
          </table:table-cell>
          <table:table-cell table:style-name="表格53.A3" office:value-type="string">
            <text:p text:style-name="P23"><text:span text:style-name="T28">最多往下走「樹高」層</text:span>，樹高 = log n</text:p>
          </table:table-cell>
        </table:table-row>
      </table:table>
      <text:p text:style-name="P18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26">💡 完全二元樹的高度為什麼是 log n？</text:p>
            <text:p text:style-name="P17">完全二元樹每一層的節點數恰好是上一層的兩倍。若有 n 個節點，則：</text:p>
            <table:table table:name="表格55" table:style-name="表格55">
              <table:table-column table:style-name="表格55.A"/>
              <table:table-row table:style-name="表格55.1">
                <table:table-cell table:style-name="表格55.A1" office:value-type="string">
                  <text:p text:style-name="P27">第 1 層：1 個節點</text:p>
                  <text:p text:style-name="P27">第 2 層：2 個節點</text:p>
                  <text:p text:style-name="P27">第 3 層：4 個節點</text:p>
                  <text:p text:style-name="P27">第 h 層：2^(h-1) 個節點</text:p>
                  <text:p text:style-name="P27">總計：2^h - 1 ≈ n <text:s/>→ <text:s/><text:span text:style-name="T29">h ≈ log₂(n)</text:span></text:p>
                </table:table-cell>
              </table:table-row>
            </table:table>
            <text:p text:style-name="P35"/>
            <text:p text:style-name="P36">因此 Up-Heap / Down-Heap 最多走 log n 步，時間複雜度為 O(log n)。</text:p>
          </table:table-cell>
        </table:table-row>
      </table:table>
      <text:p text:style-name="P30"/>
      <text:h text:style-name="P37" text:outline-level="2">1.4 <text:span text:style-name="T30">完全二元樹 ≠ BST</text:span>（重要觀念辨別）</text:h>
      <text:p text:style-name="P17"><text:span text:style-name="T14">「完全二元樹」和「BST」是兩個完全獨立的概念</text:span>，<text:span text:style-name="T12">描述的根本是不同的事情</text:span>：</text:p>
      <text:p text:style-name="P18"/>
      <table:table table:name="表格56" table:style-name="表格56">
        <table:table-column table:style-name="表格56.A"/>
        <table:table-column table:style-name="表格56.B"/>
        <table:table-column table:style-name="表格56.C"/>
        <table:table-column table:style-name="表格56.D"/>
        <table:table-row table:style-name="表格56.1">
          <table:table-cell table:style-name="表格56.A1" office:value-type="string">
            <text:p text:style-name="P21">概念</text:p>
          </table:table-cell>
          <table:table-cell table:style-name="表格56.A1" office:value-type="string">
            <text:p text:style-name="P21">管什麼？</text:p>
          </table:table-cell>
          <table:table-cell table:style-name="表格56.A1" office:value-type="string">
            <text:p text:style-name="P21">規則</text:p>
          </table:table-cell>
          <table:table-cell table:style-name="表格56.A1" office:value-type="string">
            <text:p text:style-name="P21">目的</text:p>
          </table:table-cell>
        </table:table-row>
        <table:table-row table:style-name="表格56.1">
          <table:table-cell table:style-name="表格56.A2" office:value-type="string">
            <text:p text:style-name="P38">BST</text:p>
          </table:table-cell>
          <table:table-cell table:style-name="表格56.A2" office:value-type="string">
            <text:p text:style-name="P23">節點的大小關係</text:p>
          </table:table-cell>
          <table:table-cell table:style-name="表格56.A2" office:value-type="string">
            <text:p text:style-name="P25">左子樹 &lt; 根 &lt; 右子樹</text:p>
          </table:table-cell>
          <table:table-cell table:style-name="表格56.A2" office:value-type="string">
            <text:p text:style-name="P23">快速搜尋任意值</text:p>
          </table:table-cell>
        </table:table-row>
        <table:table-row table:style-name="表格56.1">
          <table:table-cell table:style-name="表格56.A3" office:value-type="string">
            <text:p text:style-name="P39">完全二元樹</text:p>
          </table:table-cell>
          <table:table-cell table:style-name="表格56.A3" office:value-type="string">
            <text:p text:style-name="P23">樹的形狀</text:p>
          </table:table-cell>
          <table:table-cell table:style-name="表格56.A3" office:value-type="string">
            <text:p text:style-name="P22">最後一層之外填滿；最後一層從左到右依序填入</text:p>
          </table:table-cell>
          <table:table-cell table:style-name="表格56.A3" office:value-type="string">
            <text:p text:style-name="P23">可用陣列高效儲存</text:p>
          </table:table-cell>
        </table:table-row>
      </table:table>
      <text:p text:style-name="P18"/>
      <text:p text:style-name="P17">兩者是獨立條件，可以任意組合，共有四種可能：</text:p>
      <text:p text:style-name="P18"/>
      <table:table table:name="表格57" table:style-name="表格57"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G"/>
        <text:soft-page-break/>
        <table:table-row table:style-name="表格57.1">
          <table:table-cell table:style-name="表格57.A1" office:value-type="string">
            <text:p text:style-name="P40">① BST，非完全二元樹</text:p>
            <text:p text:style-name="P27"><text:s text:c="2"/>50</text:p>
            <text:p text:style-name="P27"><text:s/>/ <text:s/>\</text:p>
            <text:p text:style-name="P27">30 <text:s text:c="2"/>80</text:p>
            <text:p text:style-name="P27"><text:s text:c="2"/>\</text:p>
            <text:p text:style-name="P27"><text:s text:c="2"/>40</text:p>
            <text:p text:style-name="P41">✓ BST（30&lt;40&lt;50&lt;80）</text:p>
            <text:p text:style-name="P42">✗ Complete（左空卻先填右）</text:p>
          </table:table-cell>
          <table:table-cell table:style-name="表格57.B1" office:value-type="string">
            <text:p text:style-name="P32"/>
          </table:table-cell>
          <table:table-cell table:style-name="表格57.A1" office:value-type="string">
            <text:p text:style-name="P40">② 完全二元樹，非BST</text:p>
            <text:p text:style-name="P27"><text:s text:c="4"/>100</text:p>
            <text:p text:style-name="P27"><text:s text:c="3"/>/ <text:s text:c="2"/>\</text:p>
            <text:p text:style-name="P27"><text:s text:c="2"/>80 <text:s text:c="3"/>70</text:p>
            <text:p text:style-name="P35"/>
            <text:p text:style-name="P41">✓ Complete（左右填滿）</text:p>
            <text:p text:style-name="P42">✗ BST（70不滿足右&gt;根）</text:p>
          </table:table-cell>
          <table:table-cell table:style-name="表格57.B1" office:value-type="string">
            <text:p text:style-name="P32"/>
          </table:table-cell>
          <table:table-cell table:style-name="表格57.E1" office:value-type="string">
            <text:p text:style-name="P43">③ 同時是兩者</text:p>
            <text:p text:style-name="P27"><text:s text:c="3"/>50</text:p>
            <text:p text:style-name="P27"><text:s text:c="2"/>/ <text:s/>\</text:p>
            <text:p text:style-name="P27"><text:s/>30 <text:s text:c="2"/>80</text:p>
            <text:p text:style-name="P27"><text:s/>/\ <text:s text:c="2"/>/</text:p>
            <text:p text:style-name="P27">20 40 70</text:p>
            <text:p text:style-name="P41">✓ BST <text:s/>✓ Complete</text:p>
          </table:table-cell>
          <table:table-cell table:style-name="表格57.B1" office:value-type="string">
            <text:p text:style-name="P32"/>
          </table:table-cell>
          <table:table-cell table:style-name="表格57.G1" office:value-type="string">
            <text:p text:style-name="P44">④ 都不是</text:p>
            <text:p text:style-name="P27">50</text:p>
            <text:p text:style-name="P27"><text:s text:c="2"/>\</text:p>
            <text:p text:style-name="P27"><text:s/>80</text:p>
            <text:p text:style-name="P35"/>
            <text:p text:style-name="P42">✗ BST（80在左違規）</text:p>
            <text:p text:style-name="P42">✗ Complete（形狀不完整）</text:p>
          </table:table-cell>
        </table:table-row>
      </table:table>
      <text:p text:style-name="P34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6">📌 一句話記憶</text:p>
            <text:p text:style-name="P32"><text:span text:style-name="T2">BST 管大小（左 &lt; 根 &lt; 右）</text:span><text:span text:style-name="T1">　　</text:span><text:span text:style-name="T2">Complete Binary Tree 管形狀（從左到右填滿）</text:span></text:p>
            <text:p text:style-name="P20">Heap = 完全二元樹 ＋ 父子大小規則（父 ≥ 子 或 父 ≤ 子）</text:p>
            <text:p text:style-name="P20">AVL = BST ＋ 平衡規則（|BF| ≤ 1）</text:p>
            <text:p text:style-name="P20">RBT = BST ＋ 顏色規則（五條）</text:p>
          </table:table-cell>
        </table:table-row>
      </table:table>
      <text:p text:style-name="P18"/>
      <text:h text:style-name="P19" text:outline-level="2">1.5 O(log n) 來源總結對照表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office:value-type="string">
            <text:p text:style-name="P21">結構</text:p>
          </table:table-cell>
          <table:table-cell table:style-name="表格59.A1" office:value-type="string">
            <text:p text:style-name="P21">O(log n) 的來源</text:p>
          </table:table-cell>
          <table:table-cell table:style-name="表格59.A1" office:value-type="string">
            <text:p text:style-name="P21">類比</text:p>
          </table:table-cell>
        </table:table-row>
        <table:table-row table:style-name="表格59.1">
          <table:table-cell table:style-name="表格59.A2" office:value-type="string">
            <text:p text:style-name="P23">BST（平衡時）</text:p>
          </table:table-cell>
          <table:table-cell table:style-name="表格59.A2" office:value-type="string">
            <text:p text:style-name="P23">每次搜尋<text:span text:style-name="T12">排除半棵樹</text:span>（利用<text:span text:style-name="T4">左 &lt; 根 &lt; 右</text:span>）</text:p>
          </table:table-cell>
          <table:table-cell table:style-name="表格59.A2" office:value-type="string">
            <text:p text:style-name="P23">像翻電話簿，每次翻到中間直接排除一半</text:p>
          </table:table-cell>
        </table:table-row>
        <table:table-row table:style-name="表格59.1">
          <table:table-cell table:style-name="表格59.A3" office:value-type="string">
            <text:p text:style-name="P23">AVL Tree</text:p>
          </table:table-cell>
          <table:table-cell table:style-name="表格59.A3" office:value-type="string">
            <text:p text:style-name="P23">同 BST，加上<text:span text:style-name="T3">強制平衡</text:span>確保不退化</text:p>
          </table:table-cell>
          <table:table-cell table:style-name="表格59.A3" office:value-type="string">
            <text:p text:style-name="P23">同上，但加了「強迫整齊」的規則</text:p>
          </table:table-cell>
        </table:table-row>
        <table:table-row table:style-name="表格59.1">
          <table:table-cell table:style-name="表格59.A2" office:value-type="string">
            <text:p text:style-name="P23">Red-Black Tree</text:p>
          </table:table-cell>
          <table:table-cell table:style-name="表格59.A2" office:value-type="string">
            <text:p text:style-name="P23">同 BST，加上<text:span text:style-name="T3">顏色規則</text:span>確保不退化</text:p>
          </table:table-cell>
          <table:table-cell table:style-name="表格59.A2" office:value-type="string">
            <text:p text:style-name="P23">同上，但用「顏色限制」代替嚴格整齊</text:p>
          </table:table-cell>
        </table:table-row>
        <table:table-row table:style-name="表格59.1">
          <table:table-cell table:style-name="表格59.A3" office:value-type="string">
            <text:p text:style-name="P23">Heap（插入/刪除）</text:p>
          </table:table-cell>
          <table:table-cell table:style-name="表格59.A3" office:value-type="string">
            <text:p text:style-name="P23"><text:span text:style-name="T13">完全二元樹的高度 = log n</text:span>，Up/Down-Heap 最多走樹高步</text:p>
          </table:table-cell>
          <table:table-cell table:style-name="表格59.A3" office:value-type="string">
            <text:p text:style-name="P23">像在高樓梯<text:span text:style-name="T3">爬樓梯</text:span>，<text:span text:style-name="T31">樓層數 = log n</text:span></text:p>
          </table:table-cell>
        </table:table-row>
      </table:table>
      <text:p text:style-name="P18"/>
      <text:p text:style-name="P45"/>
      <text:h text:style-name="P5" text:outline-level="1">二、BST（Binary Search Tree）</text:h>
      <text:h text:style-name="P46" text:outline-level="2">2.1 基本規則</text:h>
      <text:p text:style-name="P6"><text:span text:style-name="T2">BST 的核心原則：</text:span><text:span text:style-name="T1">對任意節點而言，左子樹中所有節點的值均小於該節點，右子樹中所有節點的值均大於該節點。</text:span></text:p>
      <text:p text:style-name="P7"/>
      <text:p text:style-name="P47">範例樹（中序走訪結果為排序序列）：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48"><text:s text:c="8"/>50</text:p>
            <text:p text:style-name="P48"><text:s text:c="7"/>/ <text:s/>\</text:p>
            <text:p text:style-name="P48"><text:s text:c="5"/>30 <text:s text:c="3"/>80</text:p>
            <text:p text:style-name="P48"><text:s text:c="4"/>/ \ <text:s text:c="2"/>/ \</text:p>
            <text:p text:style-name="P48"><text:s text:c="2"/>20 40 70 90</text:p>
          </table:table-cell>
        </table:table-row>
      </table:table>
      <text:p text:style-name="P7"/>
      <text:h text:style-name="P46" text:outline-level="2">2.2 插入操作</text:h>
      <text:p text:style-name="P47">插入規則：從根開始比較，小於往左走，大於往右走，直到找到空位後插入。</text:p>
      <text:p text:style-name="P7"/>
      <text:p text:style-name="P6"><text:span text:style-name="T2">範例：</text:span><text:span text:style-name="T1">將 35 插入上方樹</text:span></text:p>
      <text:list xml:id="list1190582892" text:style-name="WWNum2">
        <text:list-item text:start-value="1">
          <text:p text:style-name="P49">35 &lt; 50 → 往左走</text:p>
        </text:list-item>
        <text:list-item>
          <text:p text:style-name="P49">35 &gt; 30 → 往右走</text:p>
        </text:list-item>
        <text:list-item>
          <text:p text:style-name="P49">35 &lt; 40 → 往左走</text:p>
        </text:list-item>
        <text:list-item>
          <text:p text:style-name="P49">到達空位，插入 35</text:p>
        </text:list-item>
      </text:list>
      <text:p text:style-name="P7"/>
      <text:h text:style-name="P50" text:outline-level="2">2.3 刪除操作（考試重點！）</text:h>
      <text:p text:style-name="P51">共分三種情況，必須熟記：</text:p>
      <text:p text:style-name="P52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 table:style-name="表格4.1">
          <table:table-cell table:style-name="表格4.A1" office:value-type="string">
            <text:p text:style-name="P53">情況</text:p>
          </table:table-cell>
          <table:table-cell table:style-name="表格4.A1" office:value-type="string">
            <text:p text:style-name="P53">條件</text:p>
          </table:table-cell>
          <table:table-cell table:style-name="表格4.A1" office:value-type="string">
            <text:p text:style-name="P53">處理方式</text:p>
          </table:table-cell>
          <table:table-cell table:style-name="表格4.A1" office:value-type="string">
            <text:p text:style-name="P53">範例</text:p>
          </table:table-cell>
        </table:table-row>
        <table:table-row table:style-name="表格4.1">
          <table:table-cell table:style-name="表格4.A2" office:value-type="string">
            <text:p text:style-name="P54">① 葉節點</text:p>
          </table:table-cell>
          <table:table-cell table:style-name="表格4.A2" office:value-type="string">
            <text:p text:style-name="P54">無任何子節點</text:p>
          </table:table-cell>
          <table:table-cell table:style-name="表格4.A2" office:value-type="string">
            <text:p text:style-name="P54">直接刪除</text:p>
          </table:table-cell>
          <table:table-cell table:style-name="表格4.A2" office:value-type="string">
            <text:p text:style-name="P54">刪除 20（葉節點）：直接移除，樹無需調整</text:p>
          </table:table-cell>
        </table:table-row>
        <table:table-row table:style-name="表格4.1">
          <table:table-cell table:style-name="表格4.A3" office:value-type="string">
            <text:p text:style-name="P54">② 一個子節點</text:p>
          </table:table-cell>
          <table:table-cell table:style-name="表格4.A3" office:value-type="string">
            <text:p text:style-name="P54">只有左子樹或右子樹（另一側為空）</text:p>
          </table:table-cell>
          <table:table-cell table:style-name="表格4.A3" office:value-type="string">
            <text:p text:style-name="P54">子節點直接接替被刪節點的位置</text:p>
          </table:table-cell>
          <table:table-cell table:style-name="表格4.A3" office:value-type="string">
            <text:p text:style-name="P54">★ 注意：範例樹中 80 有兩子（70,90），不適用此情況。此情況範例：若某節點 X 只有右子 Y，刪 X 後讓 Y 接上</text:p>
          </table:table-cell>
        </table:table-row>
        <table:table-row table:style-name="表格4.1">
          <table:table-cell table:style-name="表格4.A2" office:value-type="string">
            <text:p text:style-name="P54">③ <text:span text:style-name="T32">兩個子節點</text:span></text:p>
          </table:table-cell>
          <table:table-cell table:style-name="表格4.A2" office:value-type="string">
            <text:p text:style-name="P55">左右子樹皆存在</text:p>
          </table:table-cell>
          <table:table-cell table:style-name="表格4.A2" office:value-type="string">
            <text:p text:style-name="P54"><text:span text:style-name="T4">找中序後繼</text:span>（<text:span text:style-name="T31">右子樹最小值</text:span>）替換，再刪去後繼節點</text:p>
          </table:table-cell>
          <table:table-cell table:style-name="表格4.A2" office:value-type="string">
            <text:p text:style-name="P54">刪除 30：<text:span text:style-name="T33">中序後繼是 40</text:span>（30 的右子樹最小值），以 40 替換 30</text:p>
          </table:table-cell>
        </table:table-row>
      </table:table>
      <text:p text:style-name="P52"/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56">❓ 為什麼刪除 30 要找「右子樹最小值 40」來替換？完整推導過程</text:p>
            <text:p text:style-name="P57">範例樹：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58"><text:s text:c="8"/>50</text:p>
                  <text:p text:style-name="P58"><text:s text:c="7"/>/ <text:s/>\</text:p>
                  <text:p text:style-name="P58"><text:s text:c="5"/>30 <text:s text:c="3"/>80</text:p>
                  <text:p text:style-name="P58"><text:s text:c="4"/>/ \ <text:s text:c="2"/>/ \</text:p>
                  <text:p text:style-name="P59"><text:soft-page-break/><text:span text:style-name="T20"><text:s text:c="3"/>20 40 70 90</text:span></text:p>
                </table:table-cell>
              </table:table-row>
            </table:table>
            <text:p text:style-name="P60"/>
            <text:p text:style-name="P57">Step 1：確認 30 有兩個子節點</text:p>
            <text:p text:style-name="P61">30 的左子是 20，右子是 40，兩側都有，屬於「情況③」，不能直接刪除。</text:p>
            <text:p text:style-name="P62"/>
            <text:p text:style-name="P57">Step 2：思考「刪掉 30 之後，這個位置要填什麼值？」</text:p>
            <text:p text:style-name="P61">填進來的新值必須同時滿足兩個條件：</text:p>
            <text:p text:style-name="P61">　　條件 A：必須大於左子樹所有節點（即 &gt; 20）</text:p>
            <text:p text:style-name="P61">　　條件 B：必須小於父節點 50（即 &lt; 50）</text:p>
            <text:p text:style-name="P61">換句話說，這個值必須夾在 20 和 50 之間，也就是「比 30 大一點點、又不能超過 50 的那個數」。</text:p>
            <text:p text:style-name="P62"/>
            <text:p text:style-name="P57">Step 3：在樹裡找出這個值</text:p>
            <text:p text:style-name="P61">把這棵樹的所有節點由小到大排列（中序走訪）：</text:p>
            <table:table table:name="表格62" table:style-name="表格62">
              <table:table-column table:style-name="表格62.A"/>
              <table:table-row table:style-name="表格62.1">
                <table:table-cell table:style-name="表格62.A1" office:value-type="string">
                  <text:p text:style-name="P63"><text:span text:style-name="T1">20 <text:s/>→ <text:s/></text:span><text:span text:style-name="T34">30（被刪）</text:span><text:span text:style-name="T1"> <text:s/>→ <text:s/></text:span><text:span text:style-name="T35">40（下一個！）</text:span><text:span text:style-name="T1"> <text:s/>→ <text:s/>50 <text:s/>→ <text:s/>70 <text:s/>→ <text:s/>80 <text:s/>→ <text:s/>90</text:span></text:p>
                </table:table-cell>
              </table:table-row>
            </table:table>
            <text:p text:style-name="P64"/>
            <text:p text:style-name="P59"><text:span text:style-name="T1">中序走訪中，30 的下一個數字是 40。這個「下一個」就叫做「</text:span><text:span text:style-name="T2">中序後繼（Inorder Successor）</text:span><text:span text:style-name="T1">」，它是比 30 大、且在整棵樹中最接近 30 的值，天然滿足上面的條件 A 和條件 B。</text:span></text:p>
            <text:p text:style-name="P62"/>
            <text:p text:style-name="P57">Step 4：怎麼快速找到中序後繼？</text:p>
            <text:p text:style-name="P61">不需要把整棵樹走一遍，只要記住這個公式：</text:p>
            <table:table table:name="表格63" table:style-name="表格63">
              <table:table-column table:style-name="表格63.A"/>
              <table:table-row table:style-name="表格63.1">
                <table:table-cell table:style-name="表格63.A1" office:value-type="string">
                  <text:p text:style-name="P65">中序後繼 = 被刪節點的右子樹中，最左下角（最小）的節點</text:p>
                </table:table-cell>
              </table:table-row>
            </table:table>
            <text:p text:style-name="P64"/>
            <text:p text:style-name="P61">以本例來說：30 的右子樹只有 40 一個節點，所以 40 就是中序後繼。</text:p>
            <text:p text:style-name="P62"/>
            <text:p text:style-name="P57">Step 5：執行替換，得到結果</text:p>
            <table:table table:name="表格64" table:style-name="表格64">
              <table:table-column table:style-name="表格64.A"/>
              <table:table-column table:style-name="表格64.B"/>
              <table:table-column table:style-name="表格64.A"/>
              <table:table-row table:style-name="表格64.1">
                <table:table-cell table:style-name="表格64.A1" office:value-type="string">
                  <text:p text:style-name="P66">刪除前</text:p>
                  <text:p text:style-name="P58"><text:s text:c="8"/>50</text:p>
                  <text:p text:style-name="P58"><text:s text:c="7"/>/ <text:s/>\</text:p>
                  <text:p text:style-name="P58"><text:s text:c="5"/>30 <text:s text:c="3"/>80 <text:s text:c="2"/>← 要刪 30</text:p>
                  <text:p text:style-name="P58"><text:s text:c="4"/>/ \ <text:s text:c="2"/>/ \</text:p>
                  <text:p text:style-name="P58"><text:s text:c="3"/>20 40 70 90</text:p>
                </table:table-cell>
                <table:table-cell table:style-name="表格64.B1" office:value-type="string">
                  <text:p text:style-name="P67">→</text:p>
                </table:table-cell>
                <table:table-cell table:style-name="表格64.C1" office:value-type="string">
                  <text:p text:style-name="P68">刪除後（40 替換 30）</text:p>
                  <text:p text:style-name="P58"><text:s text:c="8"/>50</text:p>
                  <text:p text:style-name="P58"><text:s text:c="7"/>/ <text:s/>\</text:p>
                  <text:p text:style-name="P58"><text:s text:c="5"/>40 <text:s text:c="3"/>80 <text:s text:c="2"/>← 40 接替 30</text:p>
                  <text:p text:style-name="P58"><text:s text:c="4"/>/ <text:s text:c="4"/>/ \</text:p>
                  <text:p text:style-name="P58"><text:s text:c="3"/>20 <text:s text:c="3"/>70 90 <text:s/>← 原 40 位置空出</text:p>
                </table:table-cell>
              </table:table-row>
            </table:table>
            <text:p text:style-name="P62"/>
            <text:p text:style-name="P59">以 40 替換 30 之後，仍滿足 BST 規則：20 &lt; 40 &lt; 50，整棵樹合法。✓</text:p>
          </table:table-cell>
        </table:table-row>
      </table:table>
      <text:p text:style-name="P52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5">📌 中序後繼（Inorder Successor）</text:p>
            <text:p text:style-name="P6"><text:span text:style-name="T2">定義：</text:span><text:span text:style-name="T1">右子樹中值最小的節點（即右子樹最左下角的節點）。</text:span><text:line-break/> <text:span text:style-name="T1">作用：在「兩個子節點」情況下，以中序後繼替換被刪節點，可維持 BST 性質。</text:span></text:p>
          </table:table-cell>
        </table:table-row>
      </table:table>
      <text:p text:style-name="P7"/>
      <text:h text:style-name="P46" text:outline-level="2"><text:soft-page-break/>2.4 時間複雜度分析</text:h>
      <table:table table:name="表格6" table:style-name="表格6">
        <table:table-column table:style-name="表格6.A" table:number-columns-repeated="3"/>
        <table:table-row table:style-name="表格6.1">
          <table:table-cell table:style-name="表格6.A1" office:value-type="string">
            <text:p text:style-name="P8">操作</text:p>
          </table:table-cell>
          <table:table-cell table:style-name="表格6.A1" office:value-type="string">
            <text:p text:style-name="P8">平均情況</text:p>
          </table:table-cell>
          <table:table-cell table:style-name="表格6.A1" office:value-type="string">
            <text:p text:style-name="P8">最差情況（退化）</text:p>
          </table:table-cell>
        </table:table-row>
        <table:table-row table:style-name="表格6.1">
          <table:table-cell table:style-name="表格6.A2" office:value-type="string">
            <text:p text:style-name="P9">搜尋</text:p>
          </table:table-cell>
          <table:table-cell table:style-name="表格6.A2" office:value-type="string">
            <text:p text:style-name="P9">O(log n)</text:p>
          </table:table-cell>
          <table:table-cell table:style-name="表格6.A2" office:value-type="string">
            <text:p text:style-name="P9">O(n)</text:p>
          </table:table-cell>
        </table:table-row>
        <table:table-row table:style-name="表格6.1">
          <table:table-cell table:style-name="表格6.A3" office:value-type="string">
            <text:p text:style-name="P9">插入</text:p>
          </table:table-cell>
          <table:table-cell table:style-name="表格6.A3" office:value-type="string">
            <text:p text:style-name="P9">O(log n)</text:p>
          </table:table-cell>
          <table:table-cell table:style-name="表格6.A3" office:value-type="string">
            <text:p text:style-name="P9">O(n)</text:p>
          </table:table-cell>
        </table:table-row>
        <table:table-row table:style-name="表格6.1">
          <table:table-cell table:style-name="表格6.A2" office:value-type="string">
            <text:p text:style-name="P9">刪除</text:p>
          </table:table-cell>
          <table:table-cell table:style-name="表格6.A2" office:value-type="string">
            <text:p text:style-name="P9">O(log n)</text:p>
          </table:table-cell>
          <table:table-cell table:style-name="表格6.A2" office:value-type="string">
            <text:p text:style-name="P9">O(n)</text:p>
          </table:table-cell>
        </table:table-row>
      </table:table>
      <text:p text:style-name="P7"/>
      <text:p text:style-name="P6"><text:span text:style-name="T2">為什麼最差是 O(n)？</text:span><text:span text:style-name="T1"> 若依序插入 1, 2, 3, 4, 5，BST 會退化成如同鏈結串列的右斜樹，搜尋必須遍歷所有節點。這正是 AVL 與 RBT 誕生的原因。</text:span></text:p>
      <text:p text:style-name="P7"/>
      <text:p text:style-name="Standard"/>
      <text:h text:style-name="P5" text:outline-level="1">三、AVL Tree（平衡二元搜尋樹）</text:h>
      <text:p text:style-name="P6"><text:span text:style-name="T2">AVL Tree = BST + 強制平衡。</text:span><text:span text:style-name="T1">在每次插入或刪除後，都會檢查並維持每個節點的「平衡因子」，確保樹的高度始終維持在 O(log n)。</text:span></text:p>
      <text:p text:style-name="P7"/>
      <text:h text:style-name="P46" text:outline-level="2">3.1 平衡因子（Balance Factor, BF）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69">BF = 左子樹高度 <text:s/>− <text:s/>右子樹高度</text:p>
            <text:p text:style-name="P70">合法範圍：BF ∈ { −1, 0, +1 }，即 |BF| ≤ 1</text:p>
          </table:table-cell>
        </table:table-row>
      </table:table>
      <text:p text:style-name="P71"/>
      <text:p text:style-name="P6"><text:span text:style-name="T2">+1：</text:span><text:span text:style-name="T1">左子樹較高，</text:span><text:span text:style-name="T2">0：</text:span><text:span text:style-name="T1">完全平衡，</text:span><text:span text:style-name="T2">−1：</text:span><text:span text:style-name="T1">右子樹較高。若 |BF| = 2，則發生失衡，必須旋轉修正。</text:span></text:p>
      <text:p text:style-name="P7"/>
      <text:h text:style-name="P50" text:outline-level="2">3.2 四種旋轉（AVL 最核心考點）</text:h>
      <text:p text:style-name="P47">插入或刪除後，若發現失衡節點，依據失衡方向分為四種情況：</text:p>
      <text:p text:style-name="P7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8">失衡類型</text:p>
          </table:table-cell>
          <table:table-cell table:style-name="表格8.A1" office:value-type="string">
            <text:p text:style-name="P8">失衡方向</text:p>
          </table:table-cell>
          <table:table-cell table:style-name="表格8.A1" office:value-type="string">
            <text:p text:style-name="P8">處理方式</text:p>
          </table:table-cell>
          <table:table-cell table:style-name="表格8.A1" office:value-type="string">
            <text:p text:style-name="P8">口訣</text:p>
          </table:table-cell>
        </table:table-row>
        <table:table-row table:style-name="表格8.1">
          <table:table-cell table:style-name="表格8.A2" office:value-type="string">
            <text:p text:style-name="P9">LL（左左）</text:p>
          </table:table-cell>
          <table:table-cell table:style-name="表格8.A2" office:value-type="string">
            <text:p text:style-name="P9">失衡節點的左子樹 → 又往左插入</text:p>
          </table:table-cell>
          <table:table-cell table:style-name="表格8.A2" office:value-type="string">
            <text:p text:style-name="P9">對失衡節點做「右旋」</text:p>
          </table:table-cell>
          <table:table-cell table:style-name="表格8.A2" office:value-type="string">
            <text:p text:style-name="P9">LL → 右旋</text:p>
          </table:table-cell>
        </table:table-row>
        <table:table-row table:style-name="表格8.1">
          <table:table-cell table:style-name="表格8.A3" office:value-type="string">
            <text:p text:style-name="P9">RR（右右）</text:p>
          </table:table-cell>
          <table:table-cell table:style-name="表格8.A3" office:value-type="string">
            <text:p text:style-name="P9">失衡節點的右子樹 → 又往右插入</text:p>
          </table:table-cell>
          <table:table-cell table:style-name="表格8.A3" office:value-type="string">
            <text:p text:style-name="P9">對失衡節點做「左旋」</text:p>
          </table:table-cell>
          <table:table-cell table:style-name="表格8.A3" office:value-type="string">
            <text:p text:style-name="P9">RR → 左旋</text:p>
          </table:table-cell>
        </table:table-row>
        <table:table-row table:style-name="表格8.1">
          <table:table-cell table:style-name="表格8.A2" office:value-type="string">
            <text:p text:style-name="P9">LR（左右）</text:p>
          </table:table-cell>
          <table:table-cell table:style-name="表格8.A2" office:value-type="string">
            <text:p text:style-name="P9">失衡節點的左子樹 → 轉而往右插入</text:p>
          </table:table-cell>
          <table:table-cell table:style-name="表格8.A2" office:value-type="string">
            <text:p text:style-name="P9">先左旋，再右旋</text:p>
          </table:table-cell>
          <table:table-cell table:style-name="表格8.A2" office:value-type="string">
            <text:p text:style-name="P9">LR → 先左後右</text:p>
          </table:table-cell>
        </table:table-row>
        <table:table-row table:style-name="表格8.1">
          <table:table-cell table:style-name="表格8.A3" office:value-type="string">
            <text:p text:style-name="P9">RL（右左）</text:p>
          </table:table-cell>
          <table:table-cell table:style-name="表格8.A3" office:value-type="string">
            <text:p text:style-name="P9">失衡節點的右子樹 → 轉而往左插入</text:p>
          </table:table-cell>
          <table:table-cell table:style-name="表格8.A3" office:value-type="string">
            <text:p text:style-name="P9">先右旋，再左旋</text:p>
          </table:table-cell>
          <table:table-cell table:style-name="表格8.A3" office:value-type="string">
            <text:p text:style-name="P9">RL → 先右後左</text:p>
          </table:table-cell>
        </table:table-row>
      </table:table>
      <text:p text:style-name="P7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5">🔑 判斷旋轉類型的步驟</text:p>
            <text:p text:style-name="P6"><text:span text:style-name="T2">Step 1：</text:span><text:span text:style-name="T1">找到失衡節點（|BF| = 2 的節點）</text:span></text:p>
            <text:p text:style-name="P6"><text:span text:style-name="T2">Step 2：</text:span><text:span text:style-name="T1">看失衡節點哪邊較高 → L 或 R</text:span></text:p>
            <text:p text:style-name="P6"><text:span text:style-name="T2">Step 3：</text:span><text:span text:style-name="T1">看新增節點在較高子樹的哪邊 → L 或 R</text:span></text:p>
            <text:p text:style-name="P6"><text:span text:style-name="T2">Step 4：</text:span><text:span text:style-name="T1">組合成 LL / RR / LR / RL，套入口訣即可</text:span></text:p>
          </table:table-cell>
        </table:table-row>
      </table:table>
      <text:p text:style-name="P14"/>
      <text:p text:style-name="P72">LL 旋轉詳解（右旋）</text:p>
      <text:p text:style-name="P47">插入 15 至以 60 為根的樹後，60 的 BF = 2（左邊太高，且是左-左失衡）：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73">旋轉前（失衡）</text:p>
            <text:p text:style-name="P48"><text:s text:c="4"/>60 <text:s/>(BF=+2 ❌)</text:p>
            <text:p text:style-name="P48"><text:s text:c="3"/>/</text:p>
            <text:p text:style-name="P48"><text:s/>25 <text:s/>(BF=+1)</text:p>
            <text:p text:style-name="P48"><text:s/>/</text:p>
            <text:p text:style-name="P48">15</text:p>
          </table:table-cell>
          <table:table-cell table:style-name="表格10.B1" office:value-type="string">
            <text:p text:style-name="P74">→</text:p>
          </table:table-cell>
          <table:table-cell table:style-name="表格10.C1" office:value-type="string">
            <text:p text:style-name="P75">右旋後（平衡）</text:p>
            <text:p text:style-name="P48"><text:s text:c="5"/>25 <text:s/>(BF=0 ✓)</text:p>
            <text:p text:style-name="P48"><text:s text:c="4"/>/ <text:s/>\</text:p>
            <text:p text:style-name="P48"><text:s text:c="2"/>15 <text:s text:c="2"/>60</text:p>
          </table:table-cell>
        </table:table-row>
      </table:table>
      <text:p text:style-name="P14"/>
      <text:p text:style-name="P72">RR 旋轉詳解（左旋）</text:p>
      <table:table table:name="表格11" table:style-name="表格11">
        <table:table-column table:style-name="表格11.A"/>
        <table:table-column table:style-name="表格11.B"/>
        <table:table-column table:style-name="表格11.C"/>
        <text:soft-page-break/>
        <table:table-row table:style-name="表格11.1">
          <table:table-cell table:style-name="表格11.A1" office:value-type="string">
            <text:p text:style-name="P73">旋轉前（失衡）</text:p>
            <text:p text:style-name="P48">15 <text:s/>(BF=−2 ❌)</text:p>
            <text:p text:style-name="P48"><text:s text:c="2"/>\</text:p>
            <text:p text:style-name="P48"><text:s/>25 <text:s/>(BF=−1)</text:p>
            <text:p text:style-name="P48"><text:s text:c="3"/>\</text:p>
            <text:p text:style-name="P48"><text:s text:c="4"/>60</text:p>
          </table:table-cell>
          <table:table-cell table:style-name="表格11.B1" office:value-type="string">
            <text:p text:style-name="P74">→</text:p>
          </table:table-cell>
          <table:table-cell table:style-name="表格11.C1" office:value-type="string">
            <text:p text:style-name="P75">左旋後（平衡）</text:p>
            <text:p text:style-name="P48"><text:s text:c="5"/>25 <text:s/>(BF=0 ✓)</text:p>
            <text:p text:style-name="P48"><text:s text:c="4"/>/ <text:s/>\</text:p>
            <text:p text:style-name="P48"><text:s text:c="2"/>15 <text:s text:c="2"/>60</text:p>
          </table:table-cell>
        </table:table-row>
      </table:table>
      <text:p text:style-name="P14"/>
      <text:p text:style-name="P72">LR 旋轉詳解（先左旋，再右旋）</text:p>
      <text:p text:style-name="P47">失衡節點在左邊，但新增節點在左子節點的右邊：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B"/>
        <table:table-column table:style-name="表格12.E"/>
        <table:table-row table:style-name="表格12.1">
          <table:table-cell table:style-name="表格12.A1" office:value-type="string">
            <text:p text:style-name="P73">原始（失衡）</text:p>
            <text:p text:style-name="P48"><text:s text:c="2"/>60 (BF=+2 ❌)</text:p>
            <text:p text:style-name="P48"><text:s text:c="2"/>/</text:p>
            <text:p text:style-name="P48">25 (BF=−1)</text:p>
            <text:p text:style-name="P48"><text:s text:c="2"/>\</text:p>
            <text:p text:style-name="P48"><text:s text:c="2"/>30</text:p>
          </table:table-cell>
          <table:table-cell table:style-name="表格12.B1" office:value-type="string">
            <text:p text:style-name="P76">→</text:p>
          </table:table-cell>
          <table:table-cell table:style-name="表格12.C1" office:value-type="string">
            <text:p text:style-name="P77">Step1: 左旋25</text:p>
            <text:p text:style-name="P48"><text:s text:c="2"/>60</text:p>
            <text:p text:style-name="P48"><text:s text:c="2"/>/</text:p>
            <text:p text:style-name="P48">30</text:p>
            <text:p text:style-name="P48">/</text:p>
            <text:p text:style-name="P48">25</text:p>
          </table:table-cell>
          <table:table-cell table:style-name="表格12.B1" office:value-type="string">
            <text:p text:style-name="P76">→</text:p>
          </table:table-cell>
          <table:table-cell table:style-name="表格12.E1" office:value-type="string">
            <text:p text:style-name="P75">Step2: 右旋60</text:p>
            <text:p text:style-name="P48"><text:s text:c="4"/>30 (BF=0 ✓)</text:p>
            <text:p text:style-name="P48"><text:s text:c="3"/>/ <text:s/>\</text:p>
            <text:p text:style-name="P48"><text:s/>25 <text:s text:c="2"/>60</text:p>
          </table:table-cell>
        </table:table-row>
      </table:table>
      <text:p text:style-name="P78"/>
      <text:p text:style-name="P6"><text:span text:style-name="T2">RL 旋轉：</text:span><text:span text:style-name="T1">方法與 LR 完全相反。失衡在右邊，新增節點在右子節點的左邊。</text:span><text:span text:style-name="T2"> 先右旋，再左旋。</text:span></text:p>
      <text:p text:style-name="P7"/>
      <text:h text:style-name="P46" text:outline-level="2">3.3 AVL 時間複雜度</text:h>
      <text:p text:style-name="P47">由於 AVL Tree 永遠保持嚴格平衡，高度始終維持在 O(log n)，因此：</text:p>
      <table:table table:name="表格13" table:style-name="表格13">
        <table:table-column table:style-name="表格13.A" table:number-columns-repeated="3"/>
        <table:table-row table:style-name="表格13.1">
          <table:table-cell table:style-name="表格13.A1" office:value-type="string">
            <text:p text:style-name="P8">操作</text:p>
          </table:table-cell>
          <table:table-cell table:style-name="表格13.A1" office:value-type="string">
            <text:p text:style-name="P8">時間複雜度</text:p>
          </table:table-cell>
          <table:table-cell table:style-name="表格13.A1" office:value-type="string">
            <text:p text:style-name="P8">說明</text:p>
          </table:table-cell>
        </table:table-row>
        <table:table-row table:style-name="表格13.1">
          <table:table-cell table:style-name="表格13.A2" office:value-type="string">
            <text:p text:style-name="P9">搜尋（Search）</text:p>
          </table:table-cell>
          <table:table-cell table:style-name="表格13.A2" office:value-type="string">
            <text:p text:style-name="P9">O(log n)</text:p>
          </table:table-cell>
          <table:table-cell table:style-name="表格13.A2" office:value-type="string">
            <text:p text:style-name="P9">永遠保證，不退化</text:p>
          </table:table-cell>
        </table:table-row>
        <table:table-row table:style-name="表格13.1">
          <table:table-cell table:style-name="表格13.A3" office:value-type="string">
            <text:p text:style-name="P9">插入（Insert）</text:p>
          </table:table-cell>
          <table:table-cell table:style-name="表格13.A3" office:value-type="string">
            <text:p text:style-name="P9">O(log n)</text:p>
          </table:table-cell>
          <table:table-cell table:style-name="表格13.A3" office:value-type="string">
            <text:p text:style-name="P9">插入後最多做 O(log n) 次旋轉</text:p>
          </table:table-cell>
        </table:table-row>
        <table:table-row table:style-name="表格13.1">
          <table:table-cell table:style-name="表格13.A2" office:value-type="string">
            <text:p text:style-name="P9">刪除（Delete）</text:p>
          </table:table-cell>
          <table:table-cell table:style-name="表格13.A2" office:value-type="string">
            <text:p text:style-name="P9">O(log n)</text:p>
          </table:table-cell>
          <table:table-cell table:style-name="表格13.A2" office:value-type="string">
            <text:p text:style-name="P9">刪除後最多做 O(log n) 次旋轉</text:p>
          </table:table-cell>
        </table:table-row>
      </table:table>
      <text:p text:style-name="P7"/>
      <text:p text:style-name="Standard"/>
      <text:h text:style-name="P5" text:outline-level="1">四、AVL Tree 實作範例：113 高考 Q3</text:h>
      <text:p text:style-name="P6"><text:span text:style-name="T1">初始 AVL Tree：</text:span><text:span text:style-name="T20">25(15, 60(30, 80))</text:span></text:p>
      <text:p text:style-name="P7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8"><text:s text:c="8"/>25 <text:s/>(BF=−1)</text:p>
            <text:p text:style-name="P48"><text:s text:c="7"/>/ <text:s/>\</text:p>
            <text:p text:style-name="P48"><text:s text:c="5"/>15 <text:s text:c="3"/>60 <text:s/>(BF=0)</text:p>
            <text:p text:style-name="P48"><text:s text:c="10"/>/ <text:s/>\</text:p>
            <text:p text:style-name="P48"><text:s text:c="8"/>30 <text:s text:c="3"/>80</text:p>
          </table:table-cell>
        </table:table-row>
      </table:table>
      <text:p text:style-name="P7"/>
      <text:h text:style-name="P50" text:outline-level="2">步驟一：插入 90</text:h>
      <text:list text:style-name="WWNum3">
        <text:list-item text:start-value="1">
          <text:p text:style-name="P79">90 &gt; 25 → 往右；90 &gt; 60 → 往右；90 &gt; 80 → 放至 80 的右子</text:p>
        </text:list-item>
        <text:list-item>
          <text:p text:style-name="P79">往上檢查：到達節點 25 時，BF = 1 − 3 = −2，超過限制，失衡！</text:p>
        </text:list-item>
        <text:list-item>
          <text:p text:style-name="P79">失衡節點 25 → 右邊太高 → 新節點 90 在右子樹的右邊 → RR 失衡</text:p>
        </text:list-item>
        <text:list-item>
          <text:p text:style-name="P79">處理：對 25 做「左旋」，60 成為新根</text:p>
        </text:list-item>
      </text:list>
      <text:p text:style-name="P7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73">插入後（失衡）</text:p>
            <text:p text:style-name="P48"><text:s text:c="2"/>25 (BF=−2 ❌)</text:p>
            <text:p text:style-name="P48"><text:s text:c="2"/>/ \</text:p>
            <text:p text:style-name="P48">15 <text:s text:c="2"/>60</text:p>
            <text:p text:style-name="P48"><text:s text:c="4"/>/ <text:s/>\</text:p>
            <text:p text:style-name="P48"><text:s text:c="2"/>30 <text:s text:c="2"/>80</text:p>
            <text:p text:style-name="P48"><text:s text:c="9"/>\</text:p>
            <text:p text:style-name="P48"><text:s text:c="9"/>90</text:p>
          </table:table-cell>
          <table:table-cell table:style-name="表格15.B1" office:value-type="string">
            <text:p text:style-name="P80">左旋→</text:p>
          </table:table-cell>
          <table:table-cell table:style-name="表格15.C1" office:value-type="string">
            <text:p text:style-name="P75">RR 左旋後（平衡）</text:p>
            <text:p text:style-name="P48"><text:s text:c="7"/>60 <text:s/>(BF=0 ✓)</text:p>
            <text:p text:style-name="P48"><text:s text:c="6"/>/ <text:s/>\</text:p>
            <text:p text:style-name="P48"><text:s text:c="4"/>25 <text:s text:c="3"/>80</text:p>
            <text:p text:style-name="P48"><text:s text:c="3"/>/ <text:s/>\ <text:s text:c="4"/>\</text:p>
            <text:p text:style-name="P48"><text:s/>15 <text:s/>30 <text:s text:c="3"/>90</text:p>
          </table:table-cell>
        </table:table-row>
      </table:table>
      <text:p text:style-name="P6"><text:span text:style-name="T1">旋轉後：</text:span><text:span text:style-name="T20">60(25(15,30), 80(−,90))</text:span></text:p>
      <text:p text:style-name="P7"/>
      <text:h text:style-name="P50" text:outline-level="2">步驟二：插入 85</text:h>
      <text:list text:continue-numbering="true" text:style-name="WWNum3">
        <text:list-item>
          <text:p text:style-name="P79">85 &gt; 60 → 右；85 &gt; 80 → 右；85 &lt; 90 → 放至 90 的左子</text:p>
        </text:list-item>
        <text:list-item>
          <text:p text:style-name="P79">往上檢查：到達節點 80 時，BF = 0 − 2 = −2，失衡！</text:p>
        </text:list-item>
        <text:list-item>
          <text:p text:style-name="P79">失衡節點 80 → 右邊太高 → 新節點 85 在右子樹 90 的左邊 → RL 失衡</text:p>
        </text:list-item>
        <text:list-item>
          <text:p text:style-name="P79">處理：先對 90 做「右旋」，再對 80 做「左旋」，85 提升為新根</text:p>
        </text:list-item>
      </text:list>
      <text:p text:style-name="P7"/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B"/>
        <table:table-column table:style-name="表格16.E"/>
        <table:table-row table:style-name="表格16.1">
          <table:table-cell table:style-name="表格16.A1" office:value-type="string">
            <text:p text:style-name="P73">插入後（失衡）</text:p>
            <text:p text:style-name="P48">80 (BF=−2 ❌)</text:p>
            <text:p text:style-name="P48"><text:s text:c="2"/>\</text:p>
            <text:p text:style-name="P48"><text:s text:c="2"/>90</text:p>
            <text:p text:style-name="P48"><text:s text:c="2"/>/</text:p>
            <text:p text:style-name="P48">85</text:p>
          </table:table-cell>
          <table:table-cell table:style-name="表格16.B1" office:value-type="string">
            <text:p text:style-name="P81">→</text:p>
          </table:table-cell>
          <table:table-cell table:style-name="表格16.C1" office:value-type="string">
            <text:p text:style-name="P77">Step1: 右旋90</text:p>
            <text:p text:style-name="P48">80</text:p>
            <text:p text:style-name="P48"><text:s text:c="2"/>\</text:p>
            <text:p text:style-name="P48"><text:s text:c="2"/>85</text:p>
            <text:p text:style-name="P48"><text:s text:c="4"/>\</text:p>
            <text:p text:style-name="P48"><text:s text:c="4"/>90</text:p>
          </table:table-cell>
          <table:table-cell table:style-name="表格16.B1" office:value-type="string">
            <text:p text:style-name="P81">→</text:p>
          </table:table-cell>
          <table:table-cell table:style-name="表格16.E1" office:value-type="string">
            <text:p text:style-name="P75">Step2: 左旋80</text:p>
            <text:p text:style-name="P48"><text:s text:c="4"/>85 (BF=0 ✓)</text:p>
            <text:p text:style-name="P48"><text:s text:c="3"/>/ <text:s/>\</text:p>
            <text:p text:style-name="P48"><text:s/>80 <text:s text:c="2"/>90</text:p>
          </table:table-cell>
        </table:table-row>
      </table:table>
      <text:p text:style-name="P6"><text:span text:style-name="T1">旋轉後完整樹：</text:span><text:span text:style-name="T20">60(25(15,30), 85(80,90))</text:span></text:p>
      <text:p text:style-name="P7"/>
      <text:h text:style-name="P50" text:outline-level="2">步驟三：刪除 15</text:h>
      <text:list text:continue-numbering="true" text:style-name="WWNum3">
        <text:list-item>
          <text:p text:style-name="P79">15 為葉節點（無任何子節點）→ 直接刪除</text:p>
        </text:list-item>
        <text:list-item>
          <text:p text:style-name="P82"><text:soft-page-break/><text:span text:style-name="T36">往上重新計算所有節點的 BF 值</text:span></text:p>
        </text:list-item>
      </text:list>
      <text:p text:style-name="P7"/>
      <text:p text:style-name="P83">最終樹與各節點 BF 值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48"><text:s text:c="9"/>60 (BF=0)</text:p>
            <text:p text:style-name="P48"><text:s text:c="8"/>/ <text:s text:c="4"/>\</text:p>
            <text:p text:style-name="P48"><text:s text:c="5"/>25(BF=−1) <text:s/>85(BF=0)</text:p>
            <text:p text:style-name="P48"><text:s text:c="8"/>\ <text:s text:c="5"/>/ <text:s text:c="4"/>\</text:p>
            <text:p text:style-name="P48"><text:s text:c="6"/>30(0) 80(0) <text:s/>90(0)</text:p>
          </table:table-cell>
        </table:table-row>
      </table:table>
      <text:p text:style-name="P7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5">✏️ 關於 BF 計算的注意事項</text:p>
            <text:p text:style-name="P47">考場筆記若出現 60(-1) 的標記，代表 BF=−1。本範例最終計算後 60 的 BF 應為 0（左高=2, 右高=2）。考試時務必自行計算，不要死背他人筆記中的數字。</text:p>
          </table:table-cell>
        </table:table-row>
      </table:table>
      <text:p text:style-name="P7"/>
      <text:p text:style-name="Standard"/>
      <text:h text:style-name="P5" text:outline-level="1">五、Red-Black Tree（紅黑樹）</text:h>
      <text:p text:style-name="P47">紅黑樹是 BST 的一種，每個節點額外儲存一個「顏色」（紅或黑），透過一套顏色規則來確保樹的高度維持在 O(log n)，避免 BST 退化的問題。</text:p>
      <text:p text:style-name="P7"/>
      <text:h text:style-name="P50" text:outline-level="2">5.1 五大核心規則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8">規則</text:p>
          </table:table-cell>
          <table:table-cell table:style-name="表格19.A1" office:value-type="string">
            <text:p text:style-name="P8">說明</text:p>
          </table:table-cell>
          <table:table-cell table:style-name="表格19.A1" office:value-type="string">
            <text:p text:style-name="P8">範例</text:p>
          </table:table-cell>
        </table:table-row>
        <table:table-row table:style-name="表格19.1">
          <table:table-cell table:style-name="表格19.A2" office:value-type="string">
            <text:p text:style-name="P9">規則一</text:p>
          </table:table-cell>
          <table:table-cell table:style-name="表格19.A2" office:value-type="string">
            <text:p text:style-name="P9">每個節點非紅即黑</text:p>
          </table:table-cell>
          <table:table-cell table:style-name="表格19.A2" office:value-type="string">
            <text:p text:style-name="P9">每個節點都有一個顏色屬性</text:p>
          </table:table-cell>
        </table:table-row>
        <table:table-row table:style-name="表格19.1">
          <table:table-cell table:style-name="表格19.A3" office:value-type="string">
            <text:p text:style-name="P9">規則二</text:p>
          </table:table-cell>
          <table:table-cell table:style-name="表格19.A3" office:value-type="string">
            <text:p text:style-name="P9">根節點（Root）必須是黑色</text:p>
          </table:table-cell>
          <table:table-cell table:style-name="表格19.A3" office:value-type="string">
            <text:p text:style-name="P9">樹的根永遠是 Black</text:p>
          </table:table-cell>
        </table:table-row>
        <table:table-row table:style-name="表格19.1">
          <table:table-cell table:style-name="表格19.A2" office:value-type="string">
            <text:p text:style-name="P9">規則三</text:p>
          </table:table-cell>
          <table:table-cell table:style-name="表格19.A2" office:value-type="string">
            <text:p text:style-name="P9">所有 NIL（空節點）都是黑色</text:p>
          </table:table-cell>
          <table:table-cell table:style-name="表格19.A2" office:value-type="string">
            <text:p text:style-name="P9">葉節點的空子節點視為黑色</text:p>
          </table:table-cell>
        </table:table-row>
        <table:table-row table:style-name="表格19.1">
          <table:table-cell table:style-name="表格19.A3" office:value-type="string">
            <text:p text:style-name="P9">規則四</text:p>
          </table:table-cell>
          <table:table-cell table:style-name="表格19.A3" office:value-type="string">
            <text:p text:style-name="P9">紅色節點的子節點必須是黑色（紅不接紅）</text:p>
          </table:table-cell>
          <table:table-cell table:style-name="表格19.A3" office:value-type="string">
            <text:p text:style-name="P9">違反：B→R→R 連續兩個紅</text:p>
          </table:table-cell>
        </table:table-row>
        <table:table-row table:style-name="表格19.1">
          <table:table-cell table:style-name="表格19.A2" office:value-type="string">
            <text:p text:style-name="P9">規則五</text:p>
          </table:table-cell>
          <table:table-cell table:style-name="表格19.A2" office:value-type="string">
            <text:p text:style-name="P9">從任一節點到其後代 NIL 的所有路徑，經過的黑色節點數目相同（Black Height 相同）</text:p>
          </table:table-cell>
          <table:table-cell table:style-name="表格19.A2" office:value-type="string">
            <text:p text:style-name="P9">保證平衡高度</text:p>
          </table:table-cell>
        </table:table-row>
      </table:table>
      <text:p text:style-name="P7"/>
      <text:h text:style-name="P46" text:outline-level="2">5.2 為什麼這些規則能保證 O(log n)？</text:h>
      <text:p text:style-name="P6"><text:span text:style-name="T2">關鍵推論：</text:span><text:span text:style-name="T1">由於「紅不能接紅」，任何路徑上紅節點不能連續出現。因此，最長路徑最多是「黑紅黑紅黑紅...」的交替排列，其長度不超過黑色節點數的兩倍。加上「黑高度相同」規則，可以數學證明：</text:span></text:p>
      <text:p text:style-name="P7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84">樹高 h ≤ 2 × log₂(n+1)，即 h = O(log n)</text:p>
          </table:table-cell>
        </table:table-row>
      </table:table>
      <text:p text:style-name="P7"/>
      <text:h text:style-name="P46" text:outline-level="2">5.3 AVL Tree vs Red-Black Tree 比較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8">比較項目</text:p>
          </table:table-cell>
          <table:table-cell table:style-name="表格21.A1" office:value-type="string">
            <text:p text:style-name="P8">AVL Tree</text:p>
          </table:table-cell>
          <table:table-cell table:style-name="表格21.A1" office:value-type="string">
            <text:p text:style-name="P8">Red-Black Tree</text:p>
          </table:table-cell>
        </table:table-row>
        <table:table-row table:style-name="表格21.1">
          <table:table-cell table:style-name="表格21.A2" office:value-type="string">
            <text:p text:style-name="P9">平衡嚴格度</text:p>
          </table:table-cell>
          <table:table-cell table:style-name="表格21.A2" office:value-type="string">
            <text:p text:style-name="P9">更嚴格（|BF| ≤ 1）</text:p>
          </table:table-cell>
          <table:table-cell table:style-name="表格21.A2" office:value-type="string">
            <text:p text:style-name="P9">較寬鬆（僅須滿足5條規則）</text:p>
          </table:table-cell>
        </table:table-row>
        <table:table-row table:style-name="表格21.1">
          <table:table-cell table:style-name="表格21.A3" office:value-type="string">
            <text:p text:style-name="P9">樹的高度</text:p>
          </table:table-cell>
          <table:table-cell table:style-name="表格21.A3" office:value-type="string">
            <text:p text:style-name="P9">更矮（查找路徑更短）</text:p>
          </table:table-cell>
          <table:table-cell table:style-name="表格21.A3" office:value-type="string">
            <text:p text:style-name="P9">稍高（最多 2log n）</text:p>
          </table:table-cell>
        </table:table-row>
        <table:table-row table:style-name="表格21.1">
          <table:table-cell table:style-name="表格21.A2" office:value-type="string">
            <text:p text:style-name="P9">旋轉次數</text:p>
          </table:table-cell>
          <table:table-cell table:style-name="表格21.A2" office:value-type="string">
            <text:p text:style-name="P9">插入/刪除可能需要較多旋轉</text:p>
          </table:table-cell>
          <table:table-cell table:style-name="表格21.A2" office:value-type="string">
            <text:p text:style-name="P9">插入最多2次旋轉，刪除最多3次</text:p>
          </table:table-cell>
        </table:table-row>
        <table:table-row table:style-name="表格21.1">
          <table:table-cell table:style-name="表格21.A3" office:value-type="string">
            <text:p text:style-name="P9">查找效能</text:p>
          </table:table-cell>
          <table:table-cell table:style-name="表格21.A3" office:value-type="string">
            <text:p text:style-name="P9">稍快（因樹較矮）</text:p>
          </table:table-cell>
          <table:table-cell table:style-name="表格21.A3" office:value-type="string">
            <text:p text:style-name="P9">稍慢（因樹可能稍高）</text:p>
          </table:table-cell>
        </table:table-row>
        <table:table-row table:style-name="表格21.1">
          <table:table-cell table:style-name="表格21.A2" office:value-type="string">
            <text:p text:style-name="P9">插入/刪除效能</text:p>
          </table:table-cell>
          <table:table-cell table:style-name="表格21.A2" office:value-type="string">
            <text:p text:style-name="P9">稍慢（旋轉較多）</text:p>
          </table:table-cell>
          <table:table-cell table:style-name="表格21.A2" office:value-type="string">
            <text:p text:style-name="P9">稍快（旋轉較少）</text:p>
          </table:table-cell>
        </table:table-row>
        <table:table-row table:style-name="表格21.1">
          <table:table-cell table:style-name="表格21.A3" office:value-type="string">
            <text:p text:style-name="P9">適用場景</text:p>
          </table:table-cell>
          <table:table-cell table:style-name="表格21.A3" office:value-type="string">
            <text:p text:style-name="P9">查找頻繁的應用</text:p>
          </table:table-cell>
          <table:table-cell table:style-name="表格21.A3" office:value-type="string">
            <text:p text:style-name="P9">插入/刪除頻繁的應用（如 Linux 核心、Java TreeMap）</text:p>
          </table:table-cell>
        </table:table-row>
      </table:table>
      <text:p text:style-name="P7"/>
      <text:p text:style-name="Standard"/>
      <text:h text:style-name="P5" text:outline-level="1">六、(2,4)-Tree 與 Red-Black Tree 的對應關係</text:h>
      <text:p text:style-name="P6"><text:span text:style-name="T2">核心觀念：</text:span><text:span text:style-name="T1">Red-Black Tree 本質上是 (2,4)-Tree（又稱 2-3-4 Tree）的二元樹表示法。理解這個對應關係，有助於真正理解為什麼 RBT 要制定那些看似奇怪的規則。</text:span></text:p>
      <text:p text:style-name="P7"/>
      <text:h text:style-name="P46" text:outline-level="2">6.1 什麼是 (2,4)-Tree？</text:h>
      <text:p text:style-name="P47">(2,4)-Tree 是一種 B-Tree，每個節點可以儲存 1 到 3 個鍵值，並有 2 到 4 個子節點：</text:p>
      <text:p text:style-name="P7"/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row table:style-name="表格22.1">
          <table:table-cell table:style-name="表格22.A1" office:value-type="string">
            <text:p text:style-name="P8">節點類型</text:p>
          </table:table-cell>
          <table:table-cell table:style-name="表格22.A1" office:value-type="string">
            <text:p text:style-name="P8">鍵值數量</text:p>
          </table:table-cell>
          <table:table-cell table:style-name="表格22.A1" office:value-type="string">
            <text:p text:style-name="P8">子節點數量</text:p>
          </table:table-cell>
          <table:table-cell table:style-name="表格22.A1" office:value-type="string">
            <text:p text:style-name="P8">範例</text:p>
          </table:table-cell>
        </table:table-row>
        <table:table-row table:style-name="表格22.1">
          <table:table-cell table:style-name="表格22.A2" office:value-type="string">
            <text:p text:style-name="P9">2-node</text:p>
          </table:table-cell>
          <table:table-cell table:style-name="表格22.A2" office:value-type="string">
            <text:p text:style-name="P9">1 個鍵值</text:p>
          </table:table-cell>
          <table:table-cell table:style-name="表格22.A2" office:value-type="string">
            <text:p text:style-name="P9">2 個子節點（或為葉）</text:p>
          </table:table-cell>
          <table:table-cell table:style-name="表格22.A2" office:value-type="string">
            <text:p text:style-name="P9">[50]</text:p>
          </table:table-cell>
        </table:table-row>
        <table:table-row table:style-name="表格22.1">
          <table:table-cell table:style-name="表格22.A3" office:value-type="string">
            <text:p text:style-name="P9">3-node</text:p>
          </table:table-cell>
          <table:table-cell table:style-name="表格22.A3" office:value-type="string">
            <text:p text:style-name="P9">2 個鍵值</text:p>
          </table:table-cell>
          <table:table-cell table:style-name="表格22.A3" office:value-type="string">
            <text:p text:style-name="P9">3 個子節點（或為葉）</text:p>
          </table:table-cell>
          <table:table-cell table:style-name="表格22.A3" office:value-type="string">
            <text:p text:style-name="P9">[30 | 50]</text:p>
          </table:table-cell>
        </table:table-row>
        <table:table-row table:style-name="表格22.1">
          <table:table-cell table:style-name="表格22.A2" office:value-type="string">
            <text:p text:style-name="P9">4-node</text:p>
          </table:table-cell>
          <table:table-cell table:style-name="表格22.A2" office:value-type="string">
            <text:p text:style-name="P9">3 個鍵值</text:p>
          </table:table-cell>
          <table:table-cell table:style-name="表格22.A2" office:value-type="string">
            <text:p text:style-name="P9">4 個子節點（或為葉）</text:p>
          </table:table-cell>
          <table:table-cell table:style-name="表格22.A2" office:value-type="string">
            <text:p text:style-name="P9">[20 | 30 | 50]</text:p>
          </table:table-cell>
        </table:table-row>
      </table:table>
      <text:p text:style-name="P7"/>
      <text:p text:style-name="P6"><text:span text:style-name="T2">最重要特性：</text:span><text:span text:style-name="T1">所有葉節點都在同一層（完全平衡），這正是 RBT「黑高度相同」規則的來源。</text:span></text:p>
      <text:p text:style-name="P7"/>
      <text:h text:style-name="P46" text:outline-level="2">6.2 (2,4)-Tree ↔ Red-Black Tree 對應表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8">(2,4)-Tree 節點</text:p>
          </table:table-cell>
          <table:table-cell table:style-name="表格23.A1" office:value-type="string">
            <text:p text:style-name="P8">RBT 對應結構</text:p>
          </table:table-cell>
          <table:table-cell table:style-name="表格23.A1" office:value-type="string">
            <text:p text:style-name="P8">說明</text:p>
          </table:table-cell>
        </table:table-row>
        <table:table-row table:style-name="表格23.1">
          <table:table-cell table:style-name="表格23.A2" office:value-type="string">
            <text:p text:style-name="P9">2-node [X]</text:p>
          </table:table-cell>
          <table:table-cell table:style-name="表格23.A2" office:value-type="string">
            <text:p text:style-name="P9">X(黑色)</text:p>
          </table:table-cell>
          <table:table-cell table:style-name="表格23.A2" office:value-type="string">
            <text:p text:style-name="P9">單一黑色節點</text:p>
          </table:table-cell>
        </table:table-row>
        <table:table-row table:style-name="表格23.1">
          <table:table-cell table:style-name="表格23.A3" office:value-type="string">
            <text:p text:style-name="P9">3-node [X | Y]</text:p>
          </table:table-cell>
          <table:table-cell table:style-name="表格23.A3" office:value-type="string">
            <text:p text:style-name="P9">X(黑) → Y(紅) 或 Y(黑) → X(紅)</text:p>
          </table:table-cell>
          <table:table-cell table:style-name="表格23.A3" office:value-type="string">
            <text:p text:style-name="P9">一黑一紅，紅節點依附在黑節點旁</text:p>
          </table:table-cell>
        </table:table-row>
        <table:table-row table:style-name="表格23.1">
          <table:table-cell table:style-name="表格23.A2" office:value-type="string">
            <text:p text:style-name="P9">4-node [X | Y | Z]</text:p>
          </table:table-cell>
          <table:table-cell table:style-name="表格23.A2" office:value-type="string">
            <text:p text:style-name="P9">Y(黑)，X(紅)，Z(紅)</text:p>
          </table:table-cell>
          <table:table-cell table:style-name="表格23.A2" office:value-type="string">
            <text:p text:style-name="P9">黑節點居中，左右各一紅節點</text:p>
          </table:table-cell>
        </table:table-row>
        <table:table-row table:style-name="表格23.1">
          <table:table-cell table:style-name="表格23.A3" office:value-type="string">
            <text:p text:style-name="P9">分裂（Split）</text:p>
          </table:table-cell>
          <table:table-cell table:style-name="表格23.A3" office:value-type="string">
            <text:p text:style-name="P9">變色 + 旋轉</text:p>
          </table:table-cell>
          <table:table-cell table:style-name="表格23.A3" office:value-type="string">
            <text:p text:style-name="P9">4-node 分裂對應 RBT 的顏色翻轉</text:p>
          </table:table-cell>
        </table:table-row>
        <table:table-row table:style-name="表格23.1">
          <table:table-cell table:style-name="表格23.A2" office:value-type="string">
            <text:p text:style-name="P9">所有葉節點同層</text:p>
          </table:table-cell>
          <table:table-cell table:style-name="表格23.A2" office:value-type="string">
            <text:p text:style-name="P9">所有路徑黑高度相同</text:p>
          </table:table-cell>
          <table:table-cell table:style-name="表格23.A2" office:value-type="string">
            <text:p text:style-name="P9">RBT 規則五的來源</text:p>
          </table:table-cell>
        </table:table-row>
      </table:table>
      <text:p text:style-name="P7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5">📝 考試速記</text:p>
            <text:p text:style-name="P6"><text:span text:style-name="T2">紅黑樹是什麼的二元表示？</text:span><text:span text:style-name="T34"> → (2,4)-Tree</text:span></text:p>
            <text:p text:style-name="P6"><text:span text:style-name="T2">為何「紅不能接紅」？</text:span><text:span text:style-name="T1"> → 紅節點代表與父節點共同組成一個 (2,4)-node，連續兩個紅表示超過 4-node 上限</text:span></text:p>
            <text:p text:style-name="P6"><text:span text:style-name="T2">為何「黑高度相同」？</text:span><text:span text:style-name="T1"> → 因為 (2,4)-Tree 所有葉節點在同一層，轉換成 RBT 後，黑色節點就對應了這個高度</text:span></text:p>
          </table:table-cell>
        </table:table-row>
      </table:table>
      <text:p text:style-name="P7"/>
      <text:h text:style-name="P46" text:outline-level="2">6.3 (2,4)-Tree 高度公式</text:h>
      <text:p text:style-name="P47">若 (2,4)-Tree 有 n 個鍵值，其高度 h 滿足：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85">log₂(n+1) ≤ h ≤ log₂(n+1) <text:s/>→ <text:s/>(2,4)-tree 高度 h，使 hRB ≤ 2h = O(log n)</text:p>
          </table:table-cell>
        </table:table-row>
      </table:table>
      <text:p text:style-name="P7"/>
      <text:p text:style-name="Standard"/>
      <text:h text:style-name="P5" text:outline-level="1">七、RBT 實作範例：115 關務 Q4（依序插入 1~8）</text:h>
      <text:p text:style-name="P47">本題展示 BST 與 RBT 插入相同資料後的巨大差異，是理解紅黑樹必要性的最佳範例。</text:p>
      <text:p text:style-name="P7"/>
      <text:h text:style-name="P50" text:outline-level="2">BST 依序插入 1, 2, 3, 4, 5, 6, 7, 8 的結果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3">BST 退化成右斜樹（鏈結串列）❌</text:p>
            <text:p text:style-name="P48">1</text:p>
            <text:p text:style-name="P48"><text:s/>\</text:p>
            <text:p text:style-name="P48"><text:s text:c="2"/>2</text:p>
            <text:p text:style-name="P48"><text:s text:c="3"/>\</text:p>
            <text:p text:style-name="P48"><text:s text:c="4"/>3</text:p>
            <text:p text:style-name="P48"><text:s text:c="5"/>\</text:p>
            <text:p text:style-name="P48"><text:s text:c="6"/>4</text:p>
            <text:p text:style-name="P48"><text:s text:c="7"/>\</text:p>
            <text:p text:style-name="P48"><text:s text:c="8"/>5 → ... → 8</text:p>
            <text:p text:style-name="P86"/>
            <text:p text:style-name="P73">高度 = 8 = O(n)，搜尋最差需走 8 步</text:p>
          </table:table-cell>
        </table:table-row>
      </table:table>
      <text:p text:style-name="P14"/>
      <text:h text:style-name="P87" text:outline-level="2">RBT 依序插入 1, 2, 3, 4, 5, 6, 7, 8 的過程</text:h>
      <text:p text:style-name="P47">RBT 在每次插入後，透過「變色」與「旋轉」維持平衡。以下是關鍵步驟：</text:p>
      <text:p text:style-name="P7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8">插入節點</text:p>
          </table:table-cell>
          <table:table-cell table:style-name="表格27.A1" office:value-type="string">
            <text:p text:style-name="P8">觸發操作</text:p>
          </table:table-cell>
          <table:table-cell table:style-name="表格27.A1" office:value-type="string">
            <text:p text:style-name="P8">說明</text:p>
          </table:table-cell>
        </table:table-row>
        <table:table-row table:style-name="表格27.1">
          <table:table-cell table:style-name="表格27.A2" office:value-type="string">
            <text:p text:style-name="P9">插入 1</text:p>
          </table:table-cell>
          <table:table-cell table:style-name="表格27.A2" office:value-type="string">
            <text:p text:style-name="P9">無</text:p>
          </table:table-cell>
          <table:table-cell table:style-name="表格27.A2" office:value-type="string">
            <text:p text:style-name="P9">1 為根，塗黑</text:p>
          </table:table-cell>
        </table:table-row>
        <table:table-row table:style-name="表格27.1">
          <table:table-cell table:style-name="表格27.A3" office:value-type="string">
            <text:p text:style-name="P9">插入 2</text:p>
          </table:table-cell>
          <table:table-cell table:style-name="表格27.A3" office:value-type="string">
            <text:p text:style-name="P9">無</text:p>
          </table:table-cell>
          <table:table-cell table:style-name="表格27.A3" office:value-type="string">
            <text:p text:style-name="P9">2 為 1 的右子，塗紅（合法）</text:p>
          </table:table-cell>
        </table:table-row>
        <table:table-row table:style-name="表格27.1">
          <table:table-cell table:style-name="表格27.A2" office:value-type="string">
            <text:p text:style-name="P9">插入 3</text:p>
          </table:table-cell>
          <table:table-cell table:style-name="表格27.A2" office:value-type="string">
            <text:p text:style-name="P9">RR 旋轉 + 變色</text:p>
          </table:table-cell>
          <table:table-cell table:style-name="表格27.A2" office:value-type="string">
            <text:p text:style-name="P9">1-2-3 連成右斜，觸發左旋，2 成為新根（黑），1 和 3 塗紅</text:p>
          </table:table-cell>
        </table:table-row>
        <table:table-row table:style-name="表格27.1">
          <table:table-cell table:style-name="表格27.A3" office:value-type="string">
            <text:p text:style-name="P9">插入 4</text:p>
          </table:table-cell>
          <table:table-cell table:style-name="表格27.A3" office:value-type="string">
            <text:p text:style-name="P9">變色</text:p>
          </table:table-cell>
          <table:table-cell table:style-name="表格27.A3" office:value-type="string">
            <text:p text:style-name="P9">4 接在 3 右，檢查後變色即可</text:p>
          </table:table-cell>
        </table:table-row>
        <table:table-row table:style-name="表格27.1">
          <table:table-cell table:style-name="表格27.A2" office:value-type="string">
            <text:p text:style-name="P9">插入 5</text:p>
          </table:table-cell>
          <table:table-cell table:style-name="表格27.A2" office:value-type="string">
            <text:p text:style-name="P9">RR 旋轉 + 變色</text:p>
          </table:table-cell>
          <table:table-cell table:style-name="表格27.A2" office:value-type="string">
            <text:p text:style-name="P9">觸發旋轉，持續調整平衡</text:p>
          </table:table-cell>
        </table:table-row>
        <table:table-row table:style-name="表格27.1">
          <table:table-cell table:style-name="表格27.A3" office:value-type="string">
            <text:p text:style-name="P9">插入 6~8</text:p>
          </table:table-cell>
          <table:table-cell table:style-name="表格27.A3" office:value-type="string">
            <text:p text:style-name="P9">多次旋轉 + 變色</text:p>
          </table:table-cell>
          <table:table-cell table:style-name="表格27.A3" office:value-type="string">
            <text:p text:style-name="P9">依此類推，RBT 持續自我修正</text:p>
          </table:table-cell>
        </table:table-row>
      </table:table>
      <text:p text:style-name="P7"/>
      <text:p text:style-name="P83">最終 RBT 結果（根=4）：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5">RBT 平衡樹（高度 ≈ 4）✓</text:p>
            <text:p text:style-name="P48"><text:s text:c="14"/>4(黑)</text:p>
            <text:p text:style-name="P48"><text:s text:c="11"/>/ <text:s text:c="7"/>\</text:p>
            <text:p text:style-name="P48"><text:s text:c="8"/>2(紅) <text:s text:c="7"/>6(紅)</text:p>
            <text:p text:style-name="P48"><text:s text:c="7"/>/ <text:s text:c="3"/>\ <text:s text:c="6"/>/ <text:s text:c="3"/>\</text:p>
            <text:p text:style-name="P48"><text:s text:c="5"/>1(黑) <text:s/>3(黑) 5(黑) <text:s/>7(黑)</text:p>
            <text:p text:style-name="P48"><text:s text:c="30"/>\</text:p>
            <text:p text:style-name="P48"><text:s text:c="30"/>8(紅)</text:p>
            <text:p text:style-name="P86"/>
            <text:p text:style-name="P75">高度 ≈ 4 = O(log n)，搜尋最差只需 4~5 步</text:p>
          </table:table-cell>
        </table:table-row>
      </table:table>
      <text:p text:style-name="P7"/>
      <text:p text:style-name="Standard"/>
      <text:h text:style-name="P5" text:outline-level="1">八、Heap（堆積）與 Priority Queue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5">⚠️ 重要觀念辨別</text:p>
            <text:p text:style-name="P6"><text:span text:style-name="T2">Heap ≠ BST！</text:span><text:span text:style-name="T1"> 很多初學者會混淆。BST 的目標是「快速搜尋任意值」；Heap 的目標是「快速取出最大值或最小值」，兩者規則完全不同。</text:span></text:p>
          </table:table-cell>
        </table:table-row>
      </table:table>
      <text:p text:style-name="P7"/>
      <text:h text:style-name="P46" text:outline-level="2">8.1 Heap 的基本規則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8">類型</text:p>
          </table:table-cell>
          <table:table-cell table:style-name="表格30.A1" office:value-type="string">
            <text:p text:style-name="P8">規則</text:p>
          </table:table-cell>
          <table:table-cell table:style-name="表格30.A1" office:value-type="string">
            <text:p text:style-name="P8">根節點</text:p>
          </table:table-cell>
          <table:table-cell table:style-name="表格30.A1" office:value-type="string">
            <text:p text:style-name="P8">應用場景</text:p>
          </table:table-cell>
        </table:table-row>
        <table:table-row table:style-name="表格30.1">
          <table:table-cell table:style-name="表格30.A2" office:value-type="string">
            <text:p text:style-name="P9">Max Heap</text:p>
          </table:table-cell>
          <table:table-cell table:style-name="表格30.A2" office:value-type="string">
            <text:p text:style-name="P9">父節點的值 ≥ 所有子節點的值</text:p>
          </table:table-cell>
          <table:table-cell table:style-name="表格30.A2" office:value-type="string">
            <text:p text:style-name="P9">最大值</text:p>
          </table:table-cell>
          <table:table-cell table:style-name="表格30.A2" office:value-type="string">
            <text:p text:style-name="P9">快速取出最大值、Heap Sort 降序</text:p>
          </table:table-cell>
        </table:table-row>
        <table:table-row table:style-name="表格30.1">
          <table:table-cell table:style-name="表格30.A3" office:value-type="string">
            <text:p text:style-name="P9">Min Heap</text:p>
          </table:table-cell>
          <table:table-cell table:style-name="表格30.A3" office:value-type="string">
            <text:p text:style-name="P9">父節點的值 ≤ 所有子節點的值</text:p>
          </table:table-cell>
          <table:table-cell table:style-name="表格30.A3" office:value-type="string">
            <text:p text:style-name="P9">最小值</text:p>
          </table:table-cell>
          <table:table-cell table:style-name="表格30.A3" office:value-type="string">
            <text:p text:style-name="P9">快速取出最小值、Priority Queue</text:p>
          </table:table-cell>
        </table:table-row>
      </table:table>
      <text:p text:style-name="P7"/>
      <text:p text:style-name="P6"><text:span text:style-name="T2">Heap 的第二個必要條件：</text:span><text:span text:style-name="T1">Heap 一定是「完全二元樹（Complete Binary Tree）」——最後一層的節點必須從左到右依序填滿，不能有空缺。</text:span></text:p>
      <text:p text:style-name="P7"/>
      <text:h text:style-name="P50" text:outline-level="2">8.2 Heap 的陣列表示法（必背公式）</text:h>
      <text:p text:style-name="P47">由於完全二元樹的特性，Heap 可以直接用陣列儲存，不需要指標。設節點從 index 1 開始：</text:p>
      <text:p text:style-name="P7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88">節點 i 的父節點：⌊i/2⌋ <text:s text:c="7"/>左子節點：2i <text:s text:c="7"/>右子節點：2i+1</text:p>
          </table:table-cell>
        </table:table-row>
      </table:table>
      <text:p text:style-name="P7"/>
      <text:p text:style-name="P6"><text:span text:style-name="T1">範例：</text:span><text:span text:style-name="T20">[90, 80, 70, 40, 30, 20, 10]（index 從 1 開始）</text:span></text:p>
      <text:list text:continue-numbering="true" text:style-name="WWNum3">
        <text:list-item>
          <text:p text:style-name="P79">A[5] = 30；A[5] 的父節點 = A[⌊5/2⌋] = A[2] = 80</text:p>
        </text:list-item>
        <text:list-item>
          <text:p text:style-name="P79">A[3] = 70；A[3] 的左子 = A[6] = 20；右子 = A[7] = 10</text:p>
        </text:list-item>
      </text:list>
      <text:p text:style-name="P7"/>
      <text:h text:style-name="P46" text:outline-level="2">8.3 插入（Up-Heap / Heapify Up）</text:h>
      <text:list text:continue-list="list1190582892" text:style-name="WWNum2">
        <text:list-item>
          <text:p text:style-name="P49">將新元素放在陣列最後（維持完全二元樹）</text:p>
        </text:list-item>
        <text:list-item>
          <text:p text:style-name="P49">與父節點比較：若違反 Heap 規則，與父節點交換</text:p>
        </text:list-item>
        <text:list-item>
          <text:p text:style-name="P49">持續往上比較，直到符合規則或到達根節點</text:p>
        </text:list-item>
      </text:list>
      <text:p text:style-name="P6"><text:span text:style-name="T2">時間複雜度：</text:span><text:span text:style-name="T1">O(log n)（最多走樹的高度步）</text:span></text:p>
      <text:p text:style-name="P7"/>
      <text:h text:style-name="P46" text:outline-level="2">8.4 刪除最大值（Down-Heap / Heapify Down）</text:h>
      <text:list text:continue-numbering="true" text:style-name="WWNum2">
        <text:list-item>
          <text:p text:style-name="P49">取出根節點（最大值）</text:p>
        </text:list-item>
        <text:list-item>
          <text:p text:style-name="P49">將陣列最後一個元素移至根的位置</text:p>
        </text:list-item>
        <text:list-item>
          <text:p text:style-name="P49">與兩個子節點中較大者比較：若違反規則，與較大子節點交換</text:p>
        </text:list-item>
        <text:list-item>
          <text:p text:style-name="P49">持續往下比較，直到符合規則或到達葉節點</text:p>
        </text:list-item>
      </text:list>
      <text:p text:style-name="P6"><text:span text:style-name="T2">時間複雜度：</text:span><text:span text:style-name="T1">O(log n)</text:span></text:p>
      <text:p text:style-name="P7"/>
      <text:h text:style-name="P46" text:outline-level="2">8.5 Heap Sort</text:h>
      <text:p text:style-name="P6"><text:span text:style-name="T2">核心概念：</text:span><text:span text:style-name="T1">利用 Max Heap，每次取出根節點（最大值），固定在陣列尾端，再對剩餘元素做 Down-Heap，直到全部排序完成。</text:span></text:p>
      <text:p text:style-name="P7"/>
      <table:table table:name="表格32" table:style-name="表格32">
        <table:table-column table:style-name="表格32.A"/>
        <table:table-column table:style-name="表格32.B"/>
        <table:table-column table:style-name="表格32.C"/>
        <text:soft-page-break/>
        <table:table-row table:style-name="表格32.1">
          <table:table-cell table:style-name="表格32.A1" office:value-type="string">
            <text:p text:style-name="P8">步驟</text:p>
          </table:table-cell>
          <table:table-cell table:style-name="表格32.A1" office:value-type="string">
            <text:p text:style-name="P8">操作</text:p>
          </table:table-cell>
          <table:table-cell table:style-name="表格32.A1" office:value-type="string">
            <text:p text:style-name="P8">時間</text:p>
          </table:table-cell>
        </table:table-row>
        <table:table-row table:style-name="表格32.1">
          <table:table-cell table:style-name="表格32.A2" office:value-type="string">
            <text:p text:style-name="P9">建立 Max Heap</text:p>
          </table:table-cell>
          <table:table-cell table:style-name="表格32.A2" office:value-type="string">
            <text:p text:style-name="P9">將 n 個元素建成 Max Heap</text:p>
          </table:table-cell>
          <table:table-cell table:style-name="表格32.A2" office:value-type="string">
            <text:p text:style-name="P9">O(n)</text:p>
          </table:table-cell>
        </table:table-row>
        <table:table-row table:style-name="表格32.1">
          <table:table-cell table:style-name="表格32.A3" office:value-type="string">
            <text:p text:style-name="P9">重複 n 次：取出最大值</text:p>
          </table:table-cell>
          <table:table-cell table:style-name="表格32.A3" office:value-type="string">
            <text:p text:style-name="P9">交換根與末端 → Down-Heap</text:p>
          </table:table-cell>
          <table:table-cell table:style-name="表格32.A3" office:value-type="string">
            <text:p text:style-name="P9">每次 O(log n)</text:p>
          </table:table-cell>
        </table:table-row>
        <table:table-row table:style-name="表格32.1">
          <table:table-cell table:style-name="表格32.A2" office:value-type="string">
            <text:p text:style-name="P9">總時間複雜度</text:p>
          </table:table-cell>
          <table:table-cell table:style-name="表格32.A2" office:value-type="string">
            <text:p text:style-name="P9">O(n) + n × O(log n)</text:p>
          </table:table-cell>
          <table:table-cell table:style-name="表格32.A2" office:value-type="string">
            <text:p text:style-name="P9">O(n log n)</text:p>
          </table:table-cell>
        </table:table-row>
      </table:table>
      <text:p text:style-name="P7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5">❓ 為什麼是 O(n log n) 而不是 O(n²)？</text:p>
            <text:p text:style-name="P47">Down-Heap 每次最多往下走「樹的高度」步，而完全二元樹高度是 O(log n)，不是 O(n)。因此 n 次操作的總時間為 n × O(log n) = O(n log n)，而非 n × n = O(n²)。</text:p>
          </table:table-cell>
        </table:table-row>
      </table:table>
      <text:p text:style-name="P7"/>
      <text:h text:style-name="P46" text:outline-level="2">8.6 Priority Queue（優先佇列）</text:h>
      <text:p text:style-name="P6"><text:span text:style-name="T2">與普通 Queue 的差異：</text:span><text:span text:style-name="T1">普通 Queue 是「先進先出（FIFO）」；Priority Queue 是「優先權高者先出」，不管到達順序。</text:span></text:p>
      <text:p text:style-name="P7"/>
      <table:table table:name="表格34" table:style-name="表格34">
        <table:table-column table:style-name="表格34.A"/>
        <table:table-column table:style-name="表格34.B" table:number-columns-repeated="2"/>
        <table:table-column table:style-name="表格34.D"/>
        <table:table-row table:style-name="表格34.1">
          <table:table-cell table:style-name="表格34.A1" office:value-type="string">
            <text:p text:style-name="P8">資料結構</text:p>
          </table:table-cell>
          <table:table-cell table:style-name="表格34.A1" office:value-type="string">
            <text:p text:style-name="P8">取出最大值</text:p>
          </table:table-cell>
          <table:table-cell table:style-name="表格34.A1" office:value-type="string">
            <text:p text:style-name="P8">插入</text:p>
          </table:table-cell>
          <table:table-cell table:style-name="表格34.A1" office:value-type="string">
            <text:p text:style-name="P8">刪除最大值</text:p>
          </table:table-cell>
        </table:table-row>
        <table:table-row table:style-name="表格34.1">
          <table:table-cell table:style-name="表格34.A2" office:value-type="string">
            <text:p text:style-name="P9">未排序 Array</text:p>
          </table:table-cell>
          <table:table-cell table:style-name="表格34.A2" office:value-type="string">
            <text:p text:style-name="P9">O(n)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n)</text:p>
          </table:table-cell>
        </table:table-row>
        <table:table-row table:style-name="表格34.1">
          <table:table-cell table:style-name="表格34.A3" office:value-type="string">
            <text:p text:style-name="P9">已排序 Array</text:p>
          </table:table-cell>
          <table:table-cell table:style-name="表格34.A3" office:value-type="string">
            <text:p text:style-name="P9">O(1)</text:p>
          </table:table-cell>
          <table:table-cell table:style-name="表格34.A3" office:value-type="string">
            <text:p text:style-name="P9">O(n)</text:p>
          </table:table-cell>
          <table:table-cell table:style-name="表格34.A3" office:value-type="string">
            <text:p text:style-name="P9">O(1)</text:p>
          </table:table-cell>
        </table:table-row>
        <table:table-row table:style-name="表格34.1">
          <table:table-cell table:style-name="表格34.A2" office:value-type="string">
            <text:p text:style-name="P9">Linked List</text:p>
          </table:table-cell>
          <table:table-cell table:style-name="表格34.A2" office:value-type="string">
            <text:p text:style-name="P9">O(n)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n)</text:p>
          </table:table-cell>
        </table:table-row>
        <table:table-row table:style-name="表格34.1">
          <table:table-cell table:style-name="表格34.A3" office:value-type="string">
            <text:p text:style-name="P9">BST（平衡）</text:p>
          </table:table-cell>
          <table:table-cell table:style-name="表格34.A3" office:value-type="string">
            <text:p text:style-name="P9">O(log n)</text:p>
          </table:table-cell>
          <table:table-cell table:style-name="表格34.A3" office:value-type="string">
            <text:p text:style-name="P9">O(log n)</text:p>
          </table:table-cell>
          <table:table-cell table:style-name="表格34.A3" office:value-type="string">
            <text:p text:style-name="P9">O(log n)</text:p>
          </table:table-cell>
        </table:table-row>
        <table:table-row table:style-name="表格34.1">
          <table:table-cell table:style-name="表格34.A2" office:value-type="string">
            <text:p text:style-name="P9">Heap（最佳選擇）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log n)</text:p>
          </table:table-cell>
          <table:table-cell table:style-name="表格34.A2" office:value-type="string">
            <text:p text:style-name="P9">O(log n)</text:p>
          </table:table-cell>
        </table:table-row>
      </table:table>
      <text:p text:style-name="P7"/>
      <text:p text:style-name="P6"><text:span text:style-name="T2">結論：</text:span><text:span text:style-name="T1">Heap 是實作 Priority Queue 的最佳資料結構，因為取出最大/最小值的時間是 O(1)，插入與刪除都是 O(log n)。</text:span></text:p>
      <text:p text:style-name="P7"/>
      <text:p text:style-name="Standard"/>
      <text:h text:style-name="P5" text:outline-level="1">九、排序法時間複雜度完整比較</text:h>
      <table:table table:name="表格35" table:style-name="表格35">
        <table:table-column table:style-name="表格35.A"/>
        <table:table-column table:style-name="表格35.B"/>
        <table:table-column table:style-name="表格35.A"/>
        <table:table-column table:style-name="表格35.D"/>
        <table:table-column table:style-name="表格35.E"/>
        <table:table-column table:style-name="表格35.F"/>
        <table:table-row table:style-name="表格35.1">
          <table:table-cell table:style-name="表格35.A1" office:value-type="string">
            <text:p text:style-name="P8">排序法</text:p>
          </table:table-cell>
          <table:table-cell table:style-name="表格35.A1" office:value-type="string">
            <text:p text:style-name="P8">最佳情況</text:p>
          </table:table-cell>
          <table:table-cell table:style-name="表格35.A1" office:value-type="string">
            <text:p text:style-name="P8">平均情況</text:p>
          </table:table-cell>
          <table:table-cell table:style-name="表格35.A1" office:value-type="string">
            <text:p text:style-name="P8">最差情況</text:p>
          </table:table-cell>
          <table:table-cell table:style-name="表格35.A1" office:value-type="string">
            <text:p text:style-name="P8">空間</text:p>
          </table:table-cell>
          <table:table-cell table:style-name="表格35.A1" office:value-type="string">
            <text:p text:style-name="P8">穩定性</text:p>
          </table:table-cell>
        </table:table-row>
        <table:table-row table:style-name="表格35.1">
          <table:table-cell table:style-name="表格35.A2" office:value-type="string">
            <text:p text:style-name="P9">Bubble Sort</text:p>
          </table:table-cell>
          <table:table-cell table:style-name="表格35.A2" office:value-type="string">
            <text:p text:style-name="P9">O(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✓ 穩定</text:p>
          </table:table-cell>
        </table:table-row>
        <table:table-row table:style-name="表格35.1">
          <table:table-cell table:style-name="表格35.A3" office:value-type="string">
            <text:p text:style-name="P9">Selection Sort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1)</text:p>
          </table:table-cell>
          <table:table-cell table:style-name="表格35.A3" office:value-type="string">
            <text:p text:style-name="P9">✗ 不穩定</text:p>
          </table:table-cell>
        </table:table-row>
        <table:table-row table:style-name="表格35.1">
          <table:table-cell table:style-name="表格35.A2" office:value-type="string">
            <text:p text:style-name="P9">Insertion Sort</text:p>
          </table:table-cell>
          <table:table-cell table:style-name="表格35.A2" office:value-type="string">
            <text:p text:style-name="P9">O(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✓ 穩定</text:p>
          </table:table-cell>
        </table:table-row>
        <table:table-row table:style-name="表格35.1">
          <table:table-cell table:style-name="表格35.A3" office:value-type="string">
            <text:p text:style-name="P9">Merge Sort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)</text:p>
          </table:table-cell>
          <table:table-cell table:style-name="表格35.A3" office:value-type="string">
            <text:p text:style-name="P9">✓ 穩定</text:p>
          </table:table-cell>
        </table:table-row>
        <table:table-row table:style-name="表格35.1">
          <table:table-cell table:style-name="表格35.A2" office:value-type="string">
            <text:p text:style-name="P9">Quick Sort</text:p>
          </table:table-cell>
          <table:table-cell table:style-name="表格35.A2" office:value-type="string">
            <text:p text:style-name="P9">O(n log n)</text:p>
          </table:table-cell>
          <table:table-cell table:style-name="表格35.A2" office:value-type="string">
            <text:p text:style-name="P9">O(n log 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✗ 不穩定</text:p>
          </table:table-cell>
        </table:table-row>
        <table:table-row table:style-name="表格35.1">
          <table:table-cell table:style-name="表格35.A3" office:value-type="string">
            <text:p text:style-name="P9">Heap Sort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1)</text:p>
          </table:table-cell>
          <table:table-cell table:style-name="表格35.A3" office:value-type="string">
            <text:p text:style-name="P9">✗ 不穩定</text:p>
          </table:table-cell>
        </table:table-row>
        <table:table-row table:style-name="表格35.1">
          <table:table-cell table:style-name="表格35.A2" office:value-type="string">
            <text:p text:style-name="P9">Binary Search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（查詢非排序）</text:p>
          </table:table-cell>
        </table:table-row>
      </table:table>
      <text:p text:style-name="P7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5">💡 考試提示</text:p>
            <text:p text:style-name="P6"><text:span text:style-name="T2">Merge Sort：</text:span><text:span text:style-name="T1">唯一在所有情況下都是 O(n log n) 且穩定的排序法，但需要額外 O(n) 空間。</text:span></text:p>
            <text:p text:style-name="P6"><text:span text:style-name="T2">Quick Sort：</text:span><text:span text:style-name="T1">最差 O(n²) 發生在每次都選到最大或最小值作為 pivot（如依序插入的已排序資料）。</text:span></text:p>
            <text:p text:style-name="P6"><text:span text:style-name="T2">Heap Sort：</text:span><text:span text:style-name="T1">原地排序（O(1) 空間），且保證 O(n log n)，但不穩定，實務效能不如 Quick Sort。</text:span></text:p>
          </table:table-cell>
        </table:table-row>
      </table:table>
      <text:p text:style-name="P7"/>
      <text:p text:style-name="Standard"/>
      <text:h text:style-name="P5" text:outline-level="1">十、考前速記總整理</text:h>
      <text:h text:style-name="P46" text:outline-level="2">10.1 時間複雜度大小排序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89">O(1) &lt; O(log n) &lt; O(n) &lt; O(n log n) &lt; O(n²) &lt; O(2ⁿ) &lt; O(n!)</text:p>
          </table:table-cell>
        </table:table-row>
      </table:table>
      <text:p text:style-name="P7"/>
      <text:h text:style-name="P46" text:outline-level="2">10.2 各結構速查表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row table:style-name="表格38.1">
          <table:table-cell table:style-name="表格38.A1" office:value-type="string">
            <text:p text:style-name="P8">結構</text:p>
          </table:table-cell>
          <table:table-cell table:style-name="表格38.A1" office:value-type="string">
            <text:p text:style-name="P8">核心規則</text:p>
          </table:table-cell>
          <table:table-cell table:style-name="表格38.A1" office:value-type="string">
            <text:p text:style-name="P8">高度</text:p>
          </table:table-cell>
          <table:table-cell table:style-name="表格38.A1" office:value-type="string">
            <text:p text:style-name="P8">最差時間</text:p>
          </table:table-cell>
        </table:table-row>
        <table:table-row table:style-name="表格38.1">
          <table:table-cell table:style-name="表格38.A2" office:value-type="string">
            <text:p text:style-name="P9">BST</text:p>
          </table:table-cell>
          <table:table-cell table:style-name="表格38.A2" office:value-type="string">
            <text:p text:style-name="P9">左 &lt; 根 &lt; 右</text:p>
          </table:table-cell>
          <table:table-cell table:style-name="表格38.A2" office:value-type="string">
            <text:p text:style-name="P9">O(n)（可退化）</text:p>
          </table:table-cell>
          <table:table-cell table:style-name="表格38.A2" office:value-type="string">
            <text:p text:style-name="P9">O(n)</text:p>
          </table:table-cell>
        </table:table-row>
        <table:table-row table:style-name="表格38.1">
          <table:table-cell table:style-name="表格38.A3" office:value-type="string">
            <text:p text:style-name="P9">AVL</text:p>
          </table:table-cell>
          <table:table-cell table:style-name="表格38.A3" office:value-type="string">
            <text:p text:style-name="P9">|BF| ≤ 1，BF = 左高 − 右高</text:p>
          </table:table-cell>
          <table:table-cell table:style-name="表格38.A3" office:value-type="string">
            <text:p text:style-name="P9">O(log n)</text:p>
          </table:table-cell>
          <table:table-cell table:style-name="表格38.A3" office:value-type="string">
            <text:p text:style-name="P9">O(log n)</text:p>
          </table:table-cell>
        </table:table-row>
        <table:table-row table:style-name="表格38.1">
          <table:table-cell table:style-name="表格38.A2" office:value-type="string">
            <text:p text:style-name="P9">RBT</text:p>
          </table:table-cell>
          <table:table-cell table:style-name="表格38.A2" office:value-type="string">
            <text:p text:style-name="P9">根黑、紅不接紅、黑高相同</text:p>
          </table:table-cell>
          <table:table-cell table:style-name="表格38.A2" office:value-type="string">
            <text:p text:style-name="P9">O(log n)</text:p>
          </table:table-cell>
          <table:table-cell table:style-name="表格38.A2" office:value-type="string">
            <text:p text:style-name="P9">O(log n)</text:p>
          </table:table-cell>
        </table:table-row>
        <table:table-row table:style-name="表格38.1">
          <table:table-cell table:style-name="表格38.A3" office:value-type="string">
            <text:p text:style-name="P9">Heap</text:p>
          </table:table-cell>
          <table:table-cell table:style-name="表格38.A3" office:value-type="string">
            <text:p text:style-name="P9">完全二元樹 + 父 ≥ 子（Max）</text:p>
          </table:table-cell>
          <table:table-cell table:style-name="表格38.A3" office:value-type="string">
            <text:p text:style-name="P9">O(log n)</text:p>
          </table:table-cell>
          <table:table-cell table:style-name="表格38.A3" office:value-type="string">
            <text:p text:style-name="P9">O(log n)（刪）</text:p>
          </table:table-cell>
        </table:table-row>
        <table:table-row table:style-name="表格38.1">
          <table:table-cell table:style-name="表格38.A2" office:value-type="string">
            <text:p text:style-name="P9">(2,4)-Tree</text:p>
          </table:table-cell>
          <table:table-cell table:style-name="表格38.A2" office:value-type="string">
            <text:p text:style-name="P9">節點有 1~3 鍵值，葉節點同層</text:p>
          </table:table-cell>
          <table:table-cell table:style-name="表格38.A2" office:value-type="string">
            <text:p text:style-name="P9">O(log n)</text:p>
          </table:table-cell>
          <table:table-cell table:style-name="表格38.A2" office:value-type="string">
            <text:p text:style-name="P9">O(log n)</text:p>
          </table:table-cell>
        </table:table-row>
      </table:table>
      <text:p text:style-name="P7"/>
      <text:h text:style-name="P50" text:outline-level="2">10.3 AVL 旋轉速查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P8">失衡類型</text:p>
          </table:table-cell>
          <table:table-cell table:style-name="表格39.A1" office:value-type="string">
            <text:p text:style-name="P8">判斷方式</text:p>
          </table:table-cell>
          <table:table-cell table:style-name="表格39.A1" office:value-type="string">
            <text:p text:style-name="P8">旋轉方式</text:p>
          </table:table-cell>
          <table:table-cell table:style-name="表格39.A1" office:value-type="string">
            <text:p text:style-name="P8">口訣</text:p>
          </table:table-cell>
        </table:table-row>
        <table:table-row table:style-name="表格39.1">
          <table:table-cell table:style-name="表格39.A2" office:value-type="string">
            <text:p text:style-name="P9">LL</text:p>
          </table:table-cell>
          <table:table-cell table:style-name="表格39.A2" office:value-type="string">
            <text:p text:style-name="P9">失衡節點 BF=+2，左子 BF=+1</text:p>
          </table:table-cell>
          <table:table-cell table:style-name="表格39.A2" office:value-type="string">
            <text:p text:style-name="P9">右旋（一次）</text:p>
          </table:table-cell>
          <table:table-cell table:style-name="表格39.A2" office:value-type="string">
            <text:p text:style-name="P9">LL → 右</text:p>
          </table:table-cell>
        </table:table-row>
        <table:table-row table:style-name="表格39.1">
          <table:table-cell table:style-name="表格39.A3" office:value-type="string">
            <text:p text:style-name="P9">RR</text:p>
          </table:table-cell>
          <table:table-cell table:style-name="表格39.A3" office:value-type="string">
            <text:p text:style-name="P9">失衡節點 BF=−2，右子 BF=−1</text:p>
          </table:table-cell>
          <table:table-cell table:style-name="表格39.A3" office:value-type="string">
            <text:p text:style-name="P9">左旋（一次）</text:p>
          </table:table-cell>
          <table:table-cell table:style-name="表格39.A3" office:value-type="string">
            <text:p text:style-name="P9">RR → 左</text:p>
          </table:table-cell>
        </table:table-row>
        <table:table-row table:style-name="表格39.1">
          <table:table-cell table:style-name="表格39.A2" office:value-type="string">
            <text:p text:style-name="P9">LR</text:p>
          </table:table-cell>
          <table:table-cell table:style-name="表格39.A2" office:value-type="string">
            <text:p text:style-name="P9">失衡節點 BF=+2，左子 BF=−1</text:p>
          </table:table-cell>
          <table:table-cell table:style-name="表格39.A2" office:value-type="string">
            <text:p text:style-name="P9">先左旋左子，再右旋失衡節點</text:p>
          </table:table-cell>
          <table:table-cell table:style-name="表格39.A2" office:value-type="string">
            <text:p text:style-name="P9">LR → 左右</text:p>
          </table:table-cell>
        </table:table-row>
        <table:table-row table:style-name="表格39.1">
          <table:table-cell table:style-name="表格39.A3" office:value-type="string">
            <text:p text:style-name="P9">RL</text:p>
          </table:table-cell>
          <table:table-cell table:style-name="表格39.A3" office:value-type="string">
            <text:p text:style-name="P9">失衡節點 BF=−2，右子 BF=+1</text:p>
          </table:table-cell>
          <table:table-cell table:style-name="表格39.A3" office:value-type="string">
            <text:p text:style-name="P9">先右旋右子，再左旋失衡節點</text:p>
          </table:table-cell>
          <table:table-cell table:style-name="表格39.A3" office:value-type="string">
            <text:p text:style-name="P9">RL → 右左</text:p>
          </table:table-cell>
        </table:table-row>
      </table:table>
      <text:p text:style-name="P7"/>
      <text:h text:style-name="P50" text:outline-level="2">10.4 RBT 核心規則速記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6"><text:span text:style-name="T2">①</text:span><text:span text:style-name="T1"> 每個節點非紅即黑　　</text:span><text:span text:style-name="T2">②</text:span><text:span text:style-name="T1"> 根節點是黑色</text:span></text:p>
            <text:p text:style-name="P6"><text:span text:style-name="T2">③</text:span><text:span text:style-name="T1"> NIL 空節點是黑色　　</text:span><text:span text:style-name="T2">④</text:span><text:span text:style-name="T1"> 紅不能接紅（Red→Red 違規）</text:span></text:p>
            <text:p text:style-name="P6"><text:span text:style-name="T2">⑤</text:span><text:span text:style-name="T1"> 所有路徑的黑高度相同 → 確保 h = O(log n)</text:span></text:p>
          </table:table-cell>
        </table:table-row>
      </table:table>
      <text:p text:style-name="P7"/>
      <text:h text:style-name="P50" text:outline-level="2">10.5 Heap 公式速記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90">父節點 = ⌊i/2⌋ <text:s text:c="7"/>左子 = 2i <text:s text:c="7"/>右子 = 2i+1</text:p>
          </table:table-cell>
        </table:table-row>
      </table:table>
      <text:p text:style-name="P7"/>
      <text:h text:style-name="P46" text:outline-level="2">10.6 各題型答題模板</text:h>
      <text:p text:style-name="P72">問：BST vs AVL vs RBT 差在哪？</text:p>
      <text:p text:style-name="P6"><text:span text:style-name="T1">BST 依「左小右大」規則儲存，但若資料有序插入會退化成鏈結串列，搜尋退化至 O(n)。AVL Tree </text:span><text:soft-page-break/><text:span text:style-name="T1">在每次插入或刪除後，強制維持每個節點 |BF| ≤ 1，透過 LL/RR/LR/RL 四種旋轉保持平衡，搜尋保證 O(log n)，但旋轉次數較多。Red-Black Tree 以五條顏色規則取代嚴格的高度限制，插入/刪除旋轉次數較少（最多 2~3 次），且同樣保證 O(log n)，適用於頻繁插刪的場景。</text:span></text:p>
      <text:p text:style-name="P7"/>
      <text:p text:style-name="P72">問：為何 RBT 高度是 O(log n)？</text:p>
      <text:p text:style-name="P47">由於「紅不能接紅」且「所有路徑黑高度相同」，最長路徑為黑紅交替，不超過最短純黑路徑的兩倍。可嚴格證明樹高 h ≤ 2log₂(n+1)，故 Search、Insert、Delete 均保證 O(log n)，不會退化。</text:p>
      <text:p text:style-name="P7"/>
      <text:p text:style-name="P72">問：(2,4)-Tree 與 RBT 的關係？</text:p>
      <text:p text:style-name="P47">Red-Black Tree 是 (2,4)-Tree 的二元樹表示法。(2,4)-Tree 的 2-node 對應 RBT 中的黑色節點，3-node 對應一黑一紅，4-node 對應黑節點左右各一紅節點。(2,4)-Tree 所有葉節點同層的性質，對應到 RBT 的「黑高度相同」規則。</text:p>
      <text:p text:style-name="P7"/>
      <text:p text:style-name="Standard"/>
      <text:h text:style-name="P5" text:outline-level="1">附錄：一分鐘衝刺速背版</text:h>
      <table:table table:name="表格48" table:style-name="表格48">
        <table:table-column table:style-name="表格48.A"/>
        <table:table-column table:style-name="表格48.B"/>
        <table:table-column table:style-name="表格48.C"/>
        <table:table-row table:style-name="表格48.1">
          <table:table-cell table:style-name="表格48.A1" office:value-type="string">
            <table:table table:name="表格42" table:style-name="表格42">
              <table:table-column table:style-name="表格42.A"/>
              <table:table-row table:style-name="表格42.1">
                <table:table-cell table:style-name="表格42.A1" office:value-type="string">
                  <text:p text:style-name="P91">BST</text:p>
                  <text:p text:style-name="P47">左 &lt; 根 &lt; 右</text:p>
                  <text:p text:style-name="P47">刪除：葉→直刪 / 一子→接上 / 兩子→中序後繼</text:p>
                  <text:p text:style-name="P47">最差 O(n)（有序插入退化）</text:p>
                </table:table-cell>
              </table:table-row>
            </table:table>
            <text:p text:style-name="P7"/>
            <table:table table:name="表格43" table:style-name="表格43">
              <table:table-column table:style-name="表格43.A"/>
              <table:table-row table:style-name="表格43.1">
                <table:table-cell table:style-name="表格43.A1" office:value-type="string">
                  <text:p text:style-name="P92">AVL</text:p>
                  <text:p text:style-name="P47">BF = 左高 − 右高，|BF| ≤ 1</text:p>
                  <text:p text:style-name="P47">LL→右旋　RR→左旋</text:p>
                  <text:p text:style-name="P47">LR→左右旋　RL→右左旋</text:p>
                  <text:p text:style-name="P47">高度保證 O(log n)</text:p>
                </table:table-cell>
              </table:table-row>
            </table:table>
            <text:p text:style-name="P7"/>
            <table:table table:name="表格44" table:style-name="表格44">
              <table:table-column table:style-name="表格44.A"/>
              <table:table-row table:style-name="表格44.1">
                <table:table-cell table:style-name="表格44.A1" office:value-type="string">
                  <text:p text:style-name="P93">Heap</text:p>
                  <text:p text:style-name="P47">完全二元樹 + 父 ≥ 子（Max Heap）</text:p>
                  <text:p text:style-name="P48">父=i/2　左=2i　右=2i+1</text:p>
                  <text:p text:style-name="P47">插入 O(log n)　取最大 O(1)</text:p>
                  <text:p text:style-name="P47">Heap Sort = O(n log n)</text:p>
                </table:table-cell>
              </table:table-row>
            </table:table>
            <text:p text:style-name="Standard"/>
          </table:table-cell>
          <table:table-cell table:style-name="表格48.A1" office:value-type="string">
            <text:p text:style-name="P6"/>
          </table:table-cell>
          <table:table-cell table:style-name="表格48.A1" office:value-type="string">
            <table:table table:name="表格45" table:style-name="表格45">
              <table:table-column table:style-name="表格45.A"/>
              <table:table-row table:style-name="表格45.1">
                <table:table-cell table:style-name="表格45.A1" office:value-type="string">
                  <text:p text:style-name="P94">RBT（紅黑樹）</text:p>
                  <text:p text:style-name="P47">① 非紅即黑　② 根黑　③ NIL黑</text:p>
                  <text:p text:style-name="P47">④ 紅不接紅　⑤ 黑高度相同</text:p>
                  <text:p text:style-name="P47">高度 h ≤ 2log(n+1) = O(log n)</text:p>
                  <text:p text:style-name="P47">= (2,4)-Tree 的二元表示</text:p>
                </table:table-cell>
              </table:table-row>
            </table:table>
            <text:p text:style-name="P7"/>
            <table:table table:name="表格46" table:style-name="表格46">
              <table:table-column table:style-name="表格46.A"/>
              <table:table-row table:style-name="表格46.1">
                <table:table-cell table:style-name="表格46.A1" office:value-type="string">
                  <text:p text:style-name="P95">(2,4)-Tree ↔ RBT</text:p>
                  <text:p text:style-name="P47">2-node = 黑節點</text:p>
                  <text:p text:style-name="P47">3-node = 黑 + 紅</text:p>
                  <text:p text:style-name="P47">4-node = 黑 + 左紅 + 右紅</text:p>
                  <text:p text:style-name="P47">Split = 變色 + 旋轉</text:p>
                </table:table-cell>
              </table:table-row>
            </table:table>
            <text:p text:style-name="P7"/>
            <table:table table:name="表格47" table:style-name="表格47">
              <table:table-column table:style-name="表格47.A"/>
              <table:table-row table:style-name="表格47.1">
                <table:table-cell table:style-name="表格47.A1" office:value-type="string">
                  <text:p text:style-name="P96">Priority Queue</text:p>
                  <text:p text:style-name="P47">不是 FIFO，是優先權高先出</text:p>
                  <text:p text:style-name="P47">以 Heap 實作最佳</text:p>
                  <text:p text:style-name="P47">取最大 O(1)，插入 O(log n)</text:p>
                </table:table-cell>
              </table:table-row>
            </table:table>
            <text:p text:style-name="Standard"/>
          </table:table-cell>
        </table:table-row>
      </table:table>
      <text:p text:style-name="P14"/>
      <text:p text:style-name="P97">祝考試順利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44</meta:editing-cycles>
    <meta:creation-date>2026-05-30T02:12:46.572000000</meta:creation-date>
    <dc:date>2026-05-30T22:31:52.352997600</dc:date>
    <meta:generator>LibreOffice/26.2.3.2$Windows_X86_64 LibreOffice_project/70e089b17412e4cb7773e41413306b17a2328c34</meta:generator>
    <meta:editing-duration>PT5H12M46S</meta:editing-duration>
    <meta:document-statistic meta:table-count="64" meta:image-count="0" meta:object-count="0" meta:page-count="21" meta:paragraph-count="777" meta:word-count="7404" meta:character-count="12381" meta:non-whitespace-character-count="10221"/>
  </office:meta>
</office:document-meta>
</file>