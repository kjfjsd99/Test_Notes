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4.586cm"/>
    </style:style>
    <style:style style:name="表格23.C" style:family="table-column">
      <style:table-column-properties style:column-width="8.045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17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29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35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3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37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text-properties officeooo:paragraph-rsid="000ee922"/>
    </style:style>
    <style:style style:name="P4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7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4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50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1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59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6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63" style:family="paragraph" style:parent-style-name="Standard">
      <style:paragraph-properties fo:text-align="center" style:justify-single-word="false"/>
      <style:text-properties officeooo:paragraph-rsid="004fb9a3"/>
    </style:style>
    <style:style style:name="P64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65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71" style:family="paragraph" style:parent-style-name="Standard">
      <style:paragraph-properties fo:margin-top="0.176cm" fo:margin-bottom="0.106cm" style:contextual-spacing="false"/>
    </style:style>
    <style:style style:name="P7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80" style:family="paragraph" style:parent-style-name="Standard">
      <style:paragraph-properties fo:margin-top="0.141cm" fo:margin-bottom="0.106cm" style:contextual-spacing="false"/>
    </style:style>
    <style:style style:name="P81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82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3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4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85" style:family="paragraph" style:parent-style-name="List_20_Paragraph" style:list-style-name="WWNum3">
      <style:paragraph-properties fo:margin-top="0.071cm" fo:margin-bottom="0.071cm" style:contextual-spacing="false"/>
    </style:style>
    <style:style style:name="P8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1f4e79" loext:opacity="100%" style:font-name="Arial" fo:font-size="11pt" style:font-name-asian="Arial2" style:font-size-asian="11pt" style:font-name-complex="Arial2" style:font-size-complex="11pt"/>
    </style:style>
    <style:style style:name="P91" style:family="paragraph" style:parent-style-name="Standard">
      <style:paragraph-properties fo:margin-top="0.071cm" fo:margin-bottom="0cm" style:contextual-spacing="false"/>
    </style:style>
    <style:style style:name="P9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6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2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6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ff3d00" loext:opacity="100%" fo:background-color="#64ffda" loext:char-shading-value="0"/>
    </style:style>
    <style:style style:name="T1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7" style:family="text">
      <style:text-properties fo:background-color="#00e676" loext:char-shading-value="0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c6ff00" loext:opacity="100%" fo:background-color="#d500f9" loext:char-shading-value="0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4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37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38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fo:background-color="#c6ff00" loext:char-shading-value="0"/>
    </style:style>
    <style:style style:name="T40" style:family="text">
      <style:text-properties fo:background-color="#ff9100" loext:char-shading-value="0"/>
    </style:style>
    <style:style style:name="T41" style:family="text">
      <style:text-properties fo:background-color="#18ffff" loext:char-shading-value="0"/>
    </style:style>
    <style:style style:name="T42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43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font-weight="bold" fo:background-color="#ff9100" loext:char-shading-value="0" style:font-weight-asian="bold" style:font-weight-complex="bold"/>
    </style:style>
    <style:style style:name="T49" style:family="text">
      <style:text-properties fo:font-weight="bold" fo:background-color="#00e676" loext:char-shading-value="0" style:font-weight-asian="bold" style:font-weight-complex="bold"/>
    </style:style>
    <style:style style:name="T50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fo:font-weight="bold" fo:background-color="#ffff00" loext:char-shading-value="0" style:font-weight-asian="bold" style:font-weight-complex="bold"/>
    </style:style>
    <style:style style:name="T52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54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6" style:family="text">
      <style:text-properties fo:font-weight="bold" fo:background-color="#ffff00" loext:char-shading-value="0" style:font-weight-asian="bold" style:font-weight-complex="bold"/>
    </style:style>
    <style:style style:name="T5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0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64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9" style:family="text">
      <style:text-properties fo:color="#ff3d00" loext:opacity="100%" fo:background-color="#ffff00" loext:char-shading-value="0"/>
    </style:style>
    <style:style style:name="T70" style:family="text">
      <style:text-properties fo:color="#76ff03" loext:opacity="100%" fo:background-color="#000000" loext:char-shading-value="0"/>
    </style:style>
    <style:style style:name="T71" style:family="text">
      <style:text-properties fo:background-color="#ffff00" loext:char-shading-value="0"/>
    </style:style>
    <style:style style:name="T72" style:family="text">
      <style:text-properties fo:background-color="#ffd740" loext:char-shading-value="0"/>
    </style:style>
    <style:style style:name="T73" style:family="text">
      <style:text-properties fo:background-color="#18ffff" loext:char-shading-value="0"/>
    </style:style>
    <style:style style:name="T74" style:family="text">
      <style:text-properties fo:background-color="#76ff03" loext:char-shading-value="0"/>
    </style:style>
    <style:style style:name="T75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7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77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78" style:family="text">
      <style:text-properties fo:color="#ff9100" loext:opacity="100%" fo:font-weight="bold" fo:background-color="#ffff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</table:table-row>
        <table:table-row table:style-name="表格1.1">
          <table:table-cell table:style-name="表格1.A3" office:value-type="string">
            <text:p text:style-name="P11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12">O(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13">O(n) 碰撞</text:p>
          </table:table-cell>
        </table:table-row>
      </table:table>
      <text:p text:style-name="P1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5">強制平衡</text:span><text:span text:style-name="T1">（</text:span><text:span text:style-name="T6">BF 介於 -1~1</text:span><text:span text:style-name="T1">），查找最快</text:span></text:p>
            <text:p text:style-name="P6"><text:span text:style-name="T2">RBT：</text:span><text:span text:style-name="T5">用紅黑規則維持平衡</text:span><text:span text:style-name="T1">，</text:span><text:span text:style-name="T7">插入/刪除旋轉次數</text:span><text:span text:style-name="T8">少於 AVL</text:span></text:p>
            <text:p text:style-name="P6"><text:span text:style-name="T2">Heap：</text:span><text:span text:style-name="T9">不是搜尋樹</text:span><text:span text:style-name="T1">，</text:span><text:span text:style-name="T10">專門快速取出最大值或最小值</text:span></text:p>
          </table:table-cell>
        </table:table-row>
      </table:table>
      <text:p text:style-name="P7"/>
      <text:p text:style-name="Standard"/>
      <text:h text:style-name="P16" text:outline-level="1">一之一、深入理解：為什麼是 O(log n)？</text:h>
      <text:p text:style-name="P17">很多初學者看到 BST、AVL、RBT、Heap 的時間複雜度都是 O(log n)，直覺認為「應該都是每次砍掉一半吧？」這個想法非常接近核心，但需要做一個重要的區分。</text:p>
      <text:p text:style-name="P18"/>
      <text:h text:style-name="P19" text:outline-level="2">1.1 三種結構的從屬關係</text:h>
      <text:p text:style-name="P20">先釐清一個容易混淆的問題：AVL、RBT 是 BST，但<text:span text:style-name="T11"> Heap 不是 BST</text:span>。</text:p>
      <text:p text:style-name="P18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21">結構</text:p>
          </table:table-cell>
          <table:table-cell table:style-name="表格49.A1" office:value-type="string">
            <text:p text:style-name="P21">是 BST 嗎？</text:p>
          </table:table-cell>
          <table:table-cell table:style-name="表格49.A1" office:value-type="string">
            <text:p text:style-name="P21">判斷依據</text:p>
          </table:table-cell>
          <table:table-cell table:style-name="表格49.A1" office:value-type="string">
            <text:p text:style-name="P22">O(log n) 的來源</text:p>
          </table:table-cell>
        </table:table-row>
        <table:table-row table:style-name="表格49.1">
          <table:table-cell table:style-name="表格49.A2" office:value-type="string">
            <text:p text:style-name="P23">BST</text:p>
          </table:table-cell>
          <table:table-cell table:style-name="表格49.A2" office:value-type="string">
            <text:p text:style-name="P23">✓ 是（BST 本身）</text:p>
          </table:table-cell>
          <table:table-cell table:style-name="表格49.C2" office:value-type="string">
            <text:p text:style-name="P24">左 &lt; 根 &lt; 右</text:p>
          </table:table-cell>
          <table:table-cell table:style-name="表格49.A2" office:value-type="string">
            <text:p text:style-name="P23">每次搜尋<text:span text:style-name="T12">排除半棵樹</text:span></text:p>
          </table:table-cell>
        </table:table-row>
        <table:table-row table:style-name="表格49.1">
          <table:table-cell table:style-name="表格49.A3" office:value-type="string">
            <text:p text:style-name="P23">AVL Tree</text:p>
          </table:table-cell>
          <table:table-cell table:style-name="表格49.A3" office:value-type="string">
            <text:p text:style-name="P23">✓ 是（BST 的一種）</text:p>
          </table:table-cell>
          <table:table-cell table:style-name="表格49.A3" office:value-type="string">
            <text:p text:style-name="P23">BST 規則 + |BF| ≤ 1</text:p>
          </table:table-cell>
          <table:table-cell table:style-name="表格49.A3" office:value-type="string">
            <text:p text:style-name="P23">每次<text:span text:style-name="T12">排除半棵樹</text:span>＋<text:span text:style-name="T3">強制平衡</text:span>不退化</text:p>
          </table:table-cell>
        </table:table-row>
        <table:table-row table:style-name="表格49.1">
          <table:table-cell table:style-name="表格49.A2" office:value-type="string">
            <text:p text:style-name="P23">Red-Black Tree</text:p>
          </table:table-cell>
          <table:table-cell table:style-name="表格49.A2" office:value-type="string">
            <text:p text:style-name="P23">✓ 是（BST 的一種）</text:p>
          </table:table-cell>
          <table:table-cell table:style-name="表格49.A2" office:value-type="string">
            <text:p text:style-name="P23">BST 規則 + 五條顏色規則</text:p>
          </table:table-cell>
          <table:table-cell table:style-name="表格49.A2" office:value-type="string">
            <text:p text:style-name="P23">每次<text:span text:style-name="T12">排除半棵樹</text:span>＋<text:span text:style-name="T3">顏色規則</text:span>不退化</text:p>
          </table:table-cell>
        </table:table-row>
        <table:table-row table:style-name="表格49.1">
          <table:table-cell table:style-name="表格49.A3" office:value-type="string">
            <text:p text:style-name="P23">Heap</text:p>
          </table:table-cell>
          <table:table-cell table:style-name="表格49.A3" office:value-type="string">
            <text:p text:style-name="P23">✗ 不是！</text:p>
          </table:table-cell>
          <table:table-cell table:style-name="表格49.A3" office:value-type="string">
            <text:p text:style-name="P25">只要求父 ≥ 子（或父 ≤ 子）</text:p>
          </table:table-cell>
          <table:table-cell table:style-name="表格49.A3" office:value-type="string">
            <text:p text:style-name="P23"><text:span text:style-name="T13">完全二元樹的高度</text:span><text:span text:style-name="T4">本身是 log n</text:span></text:p>
          </table:table-cell>
        </table:table-row>
      </table:table>
      <text:p text:style-name="P1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6">⚠️ 為什麼 Heap 不是 BST？</text:p>
            <text:p text:style-name="P17"><text:span text:style-name="T14">BST 要求「左子樹所有節點 &lt; 根 &lt; 右子樹所有節點」</text:span>，是對節點間大小關係的嚴格規定。</text:p>
            <text:p text:style-name="P17">但 <text:span text:style-name="T4">Heap 只要求「父節點 ≥（或 ≤）子節點」</text:span>，<text:span text:style-name="T15">兄弟節點之間完全沒有大小限制</text:span>。</text:p>
            <text:p text:style-name="P17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27"><text:s text:c="8"/>100</text:p>
                  <text:p text:style-name="P27"><text:s text:c="7"/>/ <text:s text:c="2"/>\</text:p>
                  <text:p text:style-name="P27"><text:s text:c="6"/>80 <text:s text:c="3"/>70 <text:s text:c="2"/>← <text:span text:style-name="T3">80 和 70 之間無大小限制（✓ Heap）</text:span></text:p>
                  <text:p text:style-name="P27"><text:s text:c="5"/>/ \</text:p>
                  <text:p text:style-name="P27"><text:s text:c="4"/>20 <text:s/>40 <text:s text:c="2"/>← <text:span text:style-name="T16">70 在根的右邊，但 70 &lt; 100</text:span>（✗ BST 規定右子必 &gt; 根不適用此位置規則）</text:p>
                </table:table-cell>
              </table:table-row>
            </table:table>
            <text:p text:style-name="P28"/>
            <text:p text:style-name="P29">結論：<text:span text:style-name="T17">BST 管的是「大小關係」</text:span>；<text:span text:style-name="T18">Heap 管的是「父子關係」</text:span>。兩者根本不同。</text:p>
          </table:table-cell>
        </table:table-row>
      </table:table>
      <text:p text:style-name="P30"/>
      <text:h text:style-name="P19" text:outline-level="2">1.2 BST / AVL / RBT 的 O(log n)：每次排除半棵樹</text:h>
      <text:p text:style-name="P17">搜尋時，<text:span text:style-name="T3">BST 的「左 &lt; 根 &lt; 右」規則</text:span>使得<text:span text:style-name="T14">每次比較都能排除整整一半的節點</text:span>，這<text:span text:style-name="T19">與二元搜尋（Binary Search）的原理完全相同</text:span>：</text:p>
      <text:p text:style-name="P18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1">搜尋 70 的過程：</text:p>
            <text:p text:style-name="P27"><text:s text:c="8"/>50 <text:s text:c="7"/>← 70 &gt; 50，<text:span text:style-name="T3">排除左半邊</text:span>（含 30, 20, 40）</text:p>
            <text:p text:style-name="P27"><text:s text:c="7"/>/ <text:s/>\</text:p>
            <text:p text:style-name="P32"><text:soft-page-break/><text:span text:style-name="T20"><text:s text:c="5"/>30 <text:s text:c="3"/>80 <text:s text:c="4"/>← 70 &lt; 80，</text:span><text:span text:style-name="T21">排除右半邊</text:span><text:span text:style-name="T20">（含 90）</text:span></text:p>
            <text:p text:style-name="P27"><text:s text:c="4"/>/ \ <text:s text:c="2"/>/ \</text:p>
            <text:p text:style-name="P27"><text:s text:c="3"/>20 40 70 <text:s/>90 <text:s text:c="2"/>← 找到！</text:p>
            <text:p text:style-name="P28"/>
            <text:p text:style-name="P33"><text:span text:style-name="T16">每一步都把搜尋範圍縮小一半</text:span>，故<text:span text:style-name="T12">高度 = O(log n)，搜尋 = O(log n)</text:span></text:p>
          </table:table-cell>
        </table:table-row>
      </table:table>
      <text:p text:style-name="P34"/>
      <text:p text:style-name="P32"><text:span text:style-name="T2">AVL 和 RBT 的關鍵優勢：</text:span><text:span text:style-name="T22">普通 BST 若資料有序插入</text:span><text:span text:style-name="T1">（如 1, 2, 3, 4...），</text:span><text:span text:style-name="T9">樹會退化成右斜鏈結串列，搜尋變成 </text:span><text:span text:style-name="T23">O(n)</text:span><text:span text:style-name="T1">。AVL 和 RBT </text:span><text:span text:style-name="T9">透過各自的平衡機制，保證樹不退化</text:span><text:span text:style-name="T1">，</text:span><text:span text:style-name="T24">讓「每次排除半棵樹」的前提永遠成立</text:span><text:span text:style-name="T1">，搜尋始終</text:span><text:span text:style-name="T25">維持 O(log n)</text:span><text:span text:style-name="T1">。</text:span></text:p>
      <text:p text:style-name="P18"/>
      <text:h text:style-name="P19" text:outline-level="2">1.3 Heap 的 <text:span text:style-name="T26">O(log n)：來自完全二元樹的高度</text:span></text:h>
      <text:p text:style-name="P17"><text:span text:style-name="T14">Heap 的 O(log n) 有完全不同的來源</text:span>，不是「每次排除半棵資料」，而是<text:span text:style-name="T27">「樹本身的高度剛好是 log n」</text:span>：</text:p>
      <text:p text:style-name="P18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21">操作</text:p>
          </table:table-cell>
          <table:table-cell table:style-name="表格53.A1" office:value-type="string">
            <text:p text:style-name="P21">過程</text:p>
          </table:table-cell>
          <table:table-cell table:style-name="表格53.A1" office:value-type="string">
            <text:p text:style-name="P21">為什麼是 O(log n)？</text:p>
          </table:table-cell>
        </table:table-row>
        <table:table-row table:style-name="表格53.1">
          <table:table-cell table:style-name="表格53.A2" office:value-type="string">
            <text:p text:style-name="P23">插入（Up-Heap）</text:p>
          </table:table-cell>
          <table:table-cell table:style-name="表格53.A2" office:value-type="string">
            <text:p text:style-name="P23">新元素放最後 → 與父節點比較 → 若違規則往上交換，重複直到合法</text:p>
          </table:table-cell>
          <table:table-cell table:style-name="表格53.A2" office:value-type="string">
            <text:p text:style-name="P23"><text:span text:style-name="T28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23">刪除最大值（Down-Heap）</text:p>
          </table:table-cell>
          <table:table-cell table:style-name="表格53.A3" office:value-type="string">
            <text:p text:style-name="P23">移除根 → 末端元素移至根 → 與較大子節點比較 → 若違規則往下交換</text:p>
          </table:table-cell>
          <table:table-cell table:style-name="表格53.A3" office:value-type="string">
            <text:p text:style-name="P23"><text:span text:style-name="T28">最多往下走「樹高」層</text:span>，樹高 = log n</text:p>
          </table:table-cell>
        </table:table-row>
      </table:table>
      <text:p text:style-name="P18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6">💡 完全二元樹的高度為什麼是 log n？</text:p>
            <text:p text:style-name="P17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27">第 1 層：1 個節點</text:p>
                  <text:p text:style-name="P27">第 2 層：2 個節點</text:p>
                  <text:p text:style-name="P27">第 3 層：4 個節點</text:p>
                  <text:p text:style-name="P27">第 h 層：2^(h-1) 個節點</text:p>
                  <text:p text:style-name="P27">總計：2^h - 1 ≈ n <text:s/>→ <text:s/><text:span text:style-name="T29">h ≈ log₂(n)</text:span></text:p>
                </table:table-cell>
              </table:table-row>
            </table:table>
            <text:p text:style-name="P35"/>
            <text:p text:style-name="P36">因此 Up-Heap / Down-Heap 最多走 log n 步，時間複雜度為 O(log n)。</text:p>
          </table:table-cell>
        </table:table-row>
      </table:table>
      <text:p text:style-name="P30"/>
      <text:h text:style-name="P37" text:outline-level="2">1.4 <text:span text:style-name="T30">完全二元樹 ≠ BST</text:span>（重要觀念辨別）</text:h>
      <text:p text:style-name="P17"><text:span text:style-name="T14">「完全二元樹」和「BST」是兩個完全獨立的概念</text:span>，<text:span text:style-name="T12">描述的根本是不同的事情</text:span>：</text:p>
      <text:p text:style-name="P18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21">概念</text:p>
          </table:table-cell>
          <table:table-cell table:style-name="表格56.A1" office:value-type="string">
            <text:p text:style-name="P21">管什麼？</text:p>
          </table:table-cell>
          <table:table-cell table:style-name="表格56.A1" office:value-type="string">
            <text:p text:style-name="P21">規則</text:p>
          </table:table-cell>
          <table:table-cell table:style-name="表格56.A1" office:value-type="string">
            <text:p text:style-name="P21">目的</text:p>
          </table:table-cell>
        </table:table-row>
        <table:table-row table:style-name="表格56.1">
          <table:table-cell table:style-name="表格56.A2" office:value-type="string">
            <text:p text:style-name="P38">BST</text:p>
          </table:table-cell>
          <table:table-cell table:style-name="表格56.A2" office:value-type="string">
            <text:p text:style-name="P23">節點的大小關係</text:p>
          </table:table-cell>
          <table:table-cell table:style-name="表格56.A2" office:value-type="string">
            <text:p text:style-name="P25">左子樹 &lt; 根 &lt; 右子樹</text:p>
          </table:table-cell>
          <table:table-cell table:style-name="表格56.A2" office:value-type="string">
            <text:p text:style-name="P23">快速搜尋任意值</text:p>
          </table:table-cell>
        </table:table-row>
        <table:table-row table:style-name="表格56.1">
          <table:table-cell table:style-name="表格56.A3" office:value-type="string">
            <text:p text:style-name="P39">完全二元樹</text:p>
          </table:table-cell>
          <table:table-cell table:style-name="表格56.A3" office:value-type="string">
            <text:p text:style-name="P23">樹的形狀</text:p>
          </table:table-cell>
          <table:table-cell table:style-name="表格56.A3" office:value-type="string">
            <text:p text:style-name="P22">最後一層之外填滿；最後一層從左到右依序填入</text:p>
          </table:table-cell>
          <table:table-cell table:style-name="表格56.A3" office:value-type="string">
            <text:p text:style-name="P23">可用陣列高效儲存</text:p>
          </table:table-cell>
        </table:table-row>
      </table:table>
      <text:p text:style-name="P18"/>
      <text:p text:style-name="P17">兩者是獨立條件，可以任意組合，共有四種可能：</text:p>
      <text:p text:style-name="P18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40">① BST，非完全二元樹</text:p>
            <text:p text:style-name="P27"><text:s text:c="2"/>50</text:p>
            <text:p text:style-name="P27"><text:s/>/ <text:s/>\</text:p>
            <text:p text:style-name="P27">30 <text:s text:c="2"/>80</text:p>
            <text:p text:style-name="P27"><text:s text:c="2"/>\</text:p>
            <text:p text:style-name="P27"><text:s text:c="2"/>40</text:p>
            <text:p text:style-name="P41">✓ BST（30&lt;40&lt;50&lt;80）</text:p>
            <text:p text:style-name="P42">✗ Complete（左空卻先填右）</text:p>
          </table:table-cell>
          <table:table-cell table:style-name="表格57.B1" office:value-type="string">
            <text:p text:style-name="P32"/>
          </table:table-cell>
          <table:table-cell table:style-name="表格57.A1" office:value-type="string">
            <text:p text:style-name="P40">② 完全二元樹，非BST</text:p>
            <text:p text:style-name="P27"><text:s text:c="4"/>100</text:p>
            <text:p text:style-name="P27"><text:s text:c="3"/>/ <text:s text:c="2"/>\</text:p>
            <text:p text:style-name="P27"><text:s text:c="2"/>80 <text:s text:c="3"/>70</text:p>
            <text:p text:style-name="P35"/>
            <text:p text:style-name="P41">✓ Complete（左右填滿）</text:p>
            <text:p text:style-name="P42">✗ BST（70不滿足右&gt;根）</text:p>
          </table:table-cell>
          <table:table-cell table:style-name="表格57.B1" office:value-type="string">
            <text:p text:style-name="P32"/>
          </table:table-cell>
          <table:table-cell table:style-name="表格57.E1" office:value-type="string">
            <text:p text:style-name="P43">③ 同時是兩者</text:p>
            <text:p text:style-name="P27"><text:s text:c="3"/>50</text:p>
            <text:p text:style-name="P27"><text:s text:c="2"/>/ <text:s/>\</text:p>
            <text:p text:style-name="P27"><text:s/>30 <text:s text:c="2"/>80</text:p>
            <text:p text:style-name="P27"><text:s/>/\ <text:s text:c="2"/>/</text:p>
            <text:p text:style-name="P27">20 40 70</text:p>
            <text:p text:style-name="P41">✓ BST <text:s/>✓ Complete</text:p>
          </table:table-cell>
          <table:table-cell table:style-name="表格57.B1" office:value-type="string">
            <text:p text:style-name="P32"/>
          </table:table-cell>
          <table:table-cell table:style-name="表格57.G1" office:value-type="string">
            <text:p text:style-name="P44">④ 都不是</text:p>
            <text:p text:style-name="P27">50</text:p>
            <text:p text:style-name="P27"><text:s text:c="2"/>\</text:p>
            <text:p text:style-name="P27"><text:s/>80</text:p>
            <text:p text:style-name="P35"/>
            <text:p text:style-name="P42">✗ BST（80在左違規）</text:p>
            <text:p text:style-name="P42">✗ Complete（形狀不完整）</text:p>
          </table:table-cell>
        </table:table-row>
      </table:table>
      <text:p text:style-name="P34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📌 一句話記憶</text:p>
            <text:p text:style-name="P32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20">Heap = 完全二元樹 ＋ 父子大小規則（父 ≥ 子 或 父 ≤ 子）</text:p>
            <text:p text:style-name="P20">AVL = BST ＋ 平衡規則（|BF| ≤ 1）</text:p>
            <text:p text:style-name="P20">RBT = BST ＋ 顏色規則（五條）</text:p>
          </table:table-cell>
        </table:table-row>
      </table:table>
      <text:p text:style-name="P18"/>
      <text:h text:style-name="P19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21">結構</text:p>
          </table:table-cell>
          <table:table-cell table:style-name="表格59.A1" office:value-type="string">
            <text:p text:style-name="P21">O(log n) 的來源</text:p>
          </table:table-cell>
          <table:table-cell table:style-name="表格59.A1" office:value-type="string">
            <text:p text:style-name="P21">類比</text:p>
          </table:table-cell>
        </table:table-row>
        <table:table-row table:style-name="表格59.1">
          <table:table-cell table:style-name="表格59.A2" office:value-type="string">
            <text:p text:style-name="P23">BST（平衡時）</text:p>
          </table:table-cell>
          <table:table-cell table:style-name="表格59.A2" office:value-type="string">
            <text:p text:style-name="P23">每次搜尋<text:span text:style-name="T12">排除半棵樹</text:span>（利用<text:span text:style-name="T4">左 &lt; 根 &lt; 右</text:span>）</text:p>
          </table:table-cell>
          <table:table-cell table:style-name="表格59.A2" office:value-type="string">
            <text:p text:style-name="P23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23">AVL Tree</text:p>
          </table:table-cell>
          <table:table-cell table:style-name="表格59.A3" office:value-type="string">
            <text:p text:style-name="P23">同 BST，加上<text:span text:style-name="T3">強制平衡</text:span>確保不退化</text:p>
          </table:table-cell>
          <table:table-cell table:style-name="表格59.A3" office:value-type="string">
            <text:p text:style-name="P23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23">Red-Black Tree</text:p>
          </table:table-cell>
          <table:table-cell table:style-name="表格59.A2" office:value-type="string">
            <text:p text:style-name="P23">同 BST，加上<text:span text:style-name="T3">顏色規則</text:span>確保不退化</text:p>
          </table:table-cell>
          <table:table-cell table:style-name="表格59.A2" office:value-type="string">
            <text:p text:style-name="P23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23">Heap（插入/刪除）</text:p>
          </table:table-cell>
          <table:table-cell table:style-name="表格59.A3" office:value-type="string">
            <text:p text:style-name="P23"><text:span text:style-name="T13">完全二元樹的高度 = log n</text:span>，Up/Down-Heap 最多走樹高步</text:p>
          </table:table-cell>
          <table:table-cell table:style-name="表格59.A3" office:value-type="string">
            <text:p text:style-name="P23">像在高樓梯<text:span text:style-name="T3">爬樓梯</text:span>，<text:span text:style-name="T31">樓層數 = log n</text:span></text:p>
          </table:table-cell>
        </table:table-row>
      </table:table>
      <text:p text:style-name="P18"/>
      <text:p text:style-name="P45"/>
      <text:h text:style-name="P5" text:outline-level="1">二、BST（Binary Search Tree）</text:h>
      <text:h text:style-name="P46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47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8"><text:s text:c="8"/>50</text:p>
            <text:p text:style-name="P48"><text:s text:c="7"/>/ <text:s/>\</text:p>
            <text:p text:style-name="P48"><text:s text:c="5"/>30 <text:s text:c="3"/>80</text:p>
            <text:p text:style-name="P48"><text:s text:c="4"/>/ \ <text:s text:c="2"/>/ \</text:p>
            <text:p text:style-name="P48"><text:s text:c="2"/>20 40 70 90</text:p>
          </table:table-cell>
        </table:table-row>
      </table:table>
      <text:p text:style-name="P7"/>
      <text:h text:style-name="P46" text:outline-level="2">2.2 插入操作</text:h>
      <text:p text:style-name="P47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2332657880" text:style-name="WWNum2">
        <text:list-item text:start-value="1">
          <text:p text:style-name="P49">35 &lt; 50 → 往左走</text:p>
        </text:list-item>
        <text:list-item>
          <text:p text:style-name="P49">35 &gt; 30 → 往右走</text:p>
        </text:list-item>
        <text:list-item>
          <text:p text:style-name="P49">35 &lt; 40 → 往左走</text:p>
        </text:list-item>
        <text:list-item>
          <text:p text:style-name="P49">到達空位，插入 35</text:p>
        </text:list-item>
      </text:list>
      <text:p text:style-name="P7"/>
      <text:h text:style-name="P50" text:outline-level="2">2.3 刪除操作（考試重點！）</text:h>
      <text:p text:style-name="P51">共分三種情況，必須熟記：</text:p>
      <text:p text:style-name="P52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53">情況</text:p>
          </table:table-cell>
          <table:table-cell table:style-name="表格4.A1" office:value-type="string">
            <text:p text:style-name="P53">條件</text:p>
          </table:table-cell>
          <table:table-cell table:style-name="表格4.A1" office:value-type="string">
            <text:p text:style-name="P53">處理方式</text:p>
          </table:table-cell>
          <table:table-cell table:style-name="表格4.A1" office:value-type="string">
            <text:p text:style-name="P53">範例</text:p>
          </table:table-cell>
        </table:table-row>
        <table:table-row table:style-name="表格4.1">
          <table:table-cell table:style-name="表格4.A2" office:value-type="string">
            <text:p text:style-name="P54">① 葉節點</text:p>
          </table:table-cell>
          <table:table-cell table:style-name="表格4.A2" office:value-type="string">
            <text:p text:style-name="P54">無任何子節點</text:p>
          </table:table-cell>
          <table:table-cell table:style-name="表格4.A2" office:value-type="string">
            <text:p text:style-name="P54">直接刪除</text:p>
          </table:table-cell>
          <table:table-cell table:style-name="表格4.A2" office:value-type="string">
            <text:p text:style-name="P54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54">② 一個子節點</text:p>
          </table:table-cell>
          <table:table-cell table:style-name="表格4.A3" office:value-type="string">
            <text:p text:style-name="P54">只有左子樹或右子樹（另一側為空）</text:p>
          </table:table-cell>
          <table:table-cell table:style-name="表格4.A3" office:value-type="string">
            <text:p text:style-name="P54">子節點直接接替被刪節點的位置</text:p>
          </table:table-cell>
          <table:table-cell table:style-name="表格4.A3" office:value-type="string">
            <text:p text:style-name="P54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54">③ <text:span text:style-name="T32">兩個子節點</text:span></text:p>
          </table:table-cell>
          <table:table-cell table:style-name="表格4.A2" office:value-type="string">
            <text:p text:style-name="P55">左右子樹皆存在</text:p>
          </table:table-cell>
          <table:table-cell table:style-name="表格4.A2" office:value-type="string">
            <text:p text:style-name="P54"><text:span text:style-name="T4">找中序後繼</text:span>（<text:span text:style-name="T31">右子樹最小值</text:span>）替換，再刪去後繼節點</text:p>
          </table:table-cell>
          <table:table-cell table:style-name="表格4.A2" office:value-type="string">
            <text:p text:style-name="P54">刪除 30：<text:span text:style-name="T3">中序後繼是 40</text:span>（30 的右子樹最小值），以 40 替換 30</text:p>
          </table:table-cell>
        </table:table-row>
      </table:table>
      <text:p text:style-name="P52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6">❓ 為什麼刪除 30 要找「右子樹最小值 40」來替換？完整推導過程</text:p>
            <text:p text:style-name="P57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58"><text:s text:c="8"/>50</text:p>
                  <text:p text:style-name="P58"><text:s text:c="7"/>/ <text:s/>\</text:p>
                  <text:p text:style-name="P58"><text:s text:c="5"/>30 <text:s text:c="3"/>80</text:p>
                  <text:p text:style-name="P58"><text:s text:c="4"/>/ \ <text:s text:c="2"/>/ \</text:p>
                  <text:p text:style-name="P59"><text:soft-page-break/><text:span text:style-name="T20"><text:s text:c="3"/>20 </text:span><text:span text:style-name="T33">40</text:span><text:span text:style-name="T20"> 70 90</text:span></text:p>
                </table:table-cell>
              </table:table-row>
            </table:table>
            <text:p text:style-name="P60"/>
            <text:p text:style-name="P57">Step 1：確認 30 有兩個子節點</text:p>
            <text:p text:style-name="P61">30 的左子是 20，右子是 40，兩側都有，屬於「情況③」，不能直接刪除。</text:p>
            <text:p text:style-name="P62"/>
            <text:p text:style-name="P57">Step 2：思考「刪掉 30 之後，這個位置要填什麼值？」</text:p>
            <text:p text:style-name="P61">填進來的新值必須同時滿足兩個條件：</text:p>
            <text:p text:style-name="P61">　　條件 A：必須大於左子樹所有節點（即 &gt; 20）</text:p>
            <text:p text:style-name="P61">　　條件 B：必須小於父節點 50（即 &lt; 50）</text:p>
            <text:p text:style-name="P61">換句話說，這個值必須夾在 20 和 50 之間，也就是「<text:span text:style-name="T14">比 30 大一點點、又不能超過 50 的那個數</text:span>」。</text:p>
            <text:p text:style-name="P62"/>
            <text:p text:style-name="P57">Step 3：在樹裡找出這個值</text:p>
            <text:p text:style-name="P61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63"><text:span text:style-name="T1">20 <text:s/>→ <text:s/></text:span><text:span text:style-name="T34">30（被刪）</text:span><text:span text:style-name="T1"> <text:s/>→ <text:s/></text:span><text:span text:style-name="T35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64"/>
            <text:p text:style-name="P59"><text:span text:style-name="T1">中序走訪中，</text:span><text:span text:style-name="T36">30 的下一個數字是 40</text:span><text:span text:style-name="T1">。</text:span><text:span text:style-name="T37">這個「下一個」</text:span><text:span text:style-name="T1">就叫做「</text:span><text:span text:style-name="T38">中序後繼（Inorder Successor）</text:span><text:span text:style-name="T1">」，它是比 30 大、且在整棵樹中最接近 30 的值，天然滿足上面的條件 A 和條件 B。</text:span></text:p>
            <text:p text:style-name="P62"/>
            <text:p text:style-name="P57">Step 4：怎麼快速找到中序後繼？</text:p>
            <text:p text:style-name="P61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5">中序後繼 = <text:span text:style-name="T18">被刪節點的</text:span><text:span text:style-name="T39">右子樹</text:span><text:span text:style-name="T18">中</text:span>，<text:span text:style-name="T40">最</text:span><text:span text:style-name="T41">左下角（最小）</text:span><text:span text:style-name="T40">的節點</text:span></text:p>
                </table:table-cell>
              </table:table-row>
            </table:table>
            <text:p text:style-name="P64"/>
            <text:p text:style-name="P61">以本例來說：30 的右子樹只有 40 一個節點，所以 40 就是中序後繼。</text:p>
            <text:p text:style-name="P62"/>
            <text:p text:style-name="P57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66">刪除前</text:p>
                  <text:p text:style-name="P58"><text:s text:c="8"/>50</text:p>
                  <text:p text:style-name="P58"><text:s text:c="7"/>/ <text:s/>\</text:p>
                  <text:p text:style-name="P58"><text:s text:c="5"/>30 <text:s text:c="3"/>80 <text:s text:c="2"/>← 要刪 30</text:p>
                  <text:p text:style-name="P58"><text:s text:c="4"/>/ \ <text:s text:c="2"/>/ \</text:p>
                  <text:p text:style-name="P58"><text:s text:c="3"/>20 40 70 90</text:p>
                </table:table-cell>
                <table:table-cell table:style-name="表格64.B1" office:value-type="string">
                  <text:p text:style-name="P67">→</text:p>
                </table:table-cell>
                <table:table-cell table:style-name="表格64.C1" office:value-type="string">
                  <text:p text:style-name="P68">刪除後（40 替換 30）</text:p>
                  <text:p text:style-name="P58"><text:s text:c="8"/>50</text:p>
                  <text:p text:style-name="P58"><text:s text:c="7"/>/ <text:s/>\</text:p>
                  <text:p text:style-name="P58"><text:s text:c="5"/>40 <text:s text:c="3"/>80 <text:s text:c="2"/>← 40 接替 30</text:p>
                  <text:p text:style-name="P58"><text:s text:c="4"/>/ <text:s text:c="4"/>/ \</text:p>
                  <text:p text:style-name="P58"><text:s text:c="3"/>20 <text:s text:c="3"/>70 90 <text:s/>← 原 40 位置空出</text:p>
                </table:table-cell>
              </table:table-row>
            </table:table>
            <text:p text:style-name="P62"/>
            <text:p text:style-name="P59">以 40 替換 30 之後，仍滿足 BST 規則：20 &lt; 40 &lt; 50，整棵樹合法。✓</text:p>
          </table:table-cell>
        </table:table-row>
      </table:table>
      <text:p text:style-name="P5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📌 中序後繼（Inorder Successor）</text:p>
            <text:p text:style-name="P6"><text:span text:style-name="T2">定義：</text:span><text:span text:style-name="T9">右子樹中值最小的節點</text:span><text:span text:style-name="T1">（即</text:span><text:span text:style-name="T42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46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</text:span><text:span text:style-name="T43">若依序插入 1, 2, 3, 4, 5，BST 會退化成如同鏈結串列的右斜樹</text:span><text:span text:style-name="T1">，搜尋必須遍歷所有節點。</text:span><text:span text:style-name="T44">這正是 AVL 與 RBT 誕生的原因</text:span><text:span text:style-name="T1">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</text:span><text:span text:style-name="T45"> BST </text:span><text:span text:style-name="T2">+ 強制平衡。</text:span><text:span text:style-name="T1">在每次插入或刪除後，都會檢查並維持</text:span><text:span text:style-name="T46">每個節點的「平衡因子」</text:span><text:span text:style-name="T1">，</text:span><text:span text:style-name="T47">確保樹的高度始終維持在 </text:span><text:span text:style-name="T36">O(log n)</text:span><text:span text:style-name="T1">。</text:span></text:p>
      <text:p text:style-name="P7"/>
      <text:h text:style-name="P46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BF = 左子樹高度 <text:s/>− <text:s/>右子樹高度</text:p>
            <text:p text:style-name="P70">合法範圍：BF ∈ { −1, 0, +1 }，即 |BF| ≤ 1</text:p>
          </table:table-cell>
        </table:table-row>
      </table:table>
      <text:p text:style-name="P71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50" text:outline-level="2">3.2 四種旋轉（AVL 最核心考點）</text:h>
      <text:p text:style-name="P47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<text:span text:style-name="T3">失衡節點</text:span>的<text:span text:style-name="T48">左</text:span>子樹 → 又<text:span text:style-name="T48">往左插入</text:span></text:p>
          </table:table-cell>
          <table:table-cell table:style-name="表格8.A2" office:value-type="string">
            <text:p text:style-name="P9"><text:span text:style-name="T4">對失衡節點</text:span>做「<text:span text:style-name="T49">右旋</text:span>」</text:p>
          </table:table-cell>
          <table:table-cell table:style-name="表格8.A2" office:value-type="string">
            <text:p text:style-name="P9"><text:span text:style-name="T3">LL</text:span> → <text:span text:style-name="T14">右</text:span>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<text:span text:style-name="T3">失衡節點</text:span>的<text:span text:style-name="T49">右</text:span>子樹 → 又<text:span text:style-name="T49">往右插入</text:span></text:p>
          </table:table-cell>
          <table:table-cell table:style-name="表格8.A3" office:value-type="string">
            <text:p text:style-name="P9"><text:span text:style-name="T4">對失衡節點</text:span>做「<text:span text:style-name="T48">左旋</text:span>」</text:p>
          </table:table-cell>
          <table:table-cell table:style-name="表格8.A3" office:value-type="string">
            <text:p text:style-name="P9"><text:span text:style-name="T3">RR</text:span> → <text:span text:style-name="T14">左</text:span>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<text:span text:style-name="T3">失衡節點</text:span>的<text:span text:style-name="T40">左</text:span>子樹 → 轉而<text:span text:style-name="T49">往右插入</text:span></text:p>
          </table:table-cell>
          <table:table-cell table:style-name="表格8.A2" office:value-type="string">
            <text:p text:style-name="P72">先左旋，再右旋</text:p>
          </table:table-cell>
          <table:table-cell table:style-name="表格8.A2" office:value-type="string">
            <text:p text:style-name="P9"><text:span text:style-name="T3">LR</text:span> → <text:span text:style-name="T14">先左後右</text:span>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<text:span text:style-name="T3">失衡節點</text:span>的<text:span text:style-name="T17">右</text:span>子樹 → 轉而<text:span text:style-name="T48">往左插入</text:span></text:p>
          </table:table-cell>
          <table:table-cell table:style-name="表格8.A3" office:value-type="string">
            <text:p text:style-name="P72">先右旋，再左旋</text:p>
          </table:table-cell>
          <table:table-cell table:style-name="表格8.A3" office:value-type="string">
            <text:p text:style-name="P9"><text:span text:style-name="T3">RL</text:span> → <text:span text:style-name="T14">先右後左</text:span>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🔑 判斷旋轉類型的步驟</text:p>
            <text:p text:style-name="P6"><text:span text:style-name="T2">Step 1：</text:span><text:span text:style-name="T9">找到失衡節點</text:span><text:span text:style-name="T1">（</text:span><text:span text:style-name="T10">|BF| = 2 的節點</text:span><text:span text:style-name="T1">）</text:span></text:p>
            <text:p text:style-name="P6"><text:span text:style-name="T2">Step 2：</text:span><text:span text:style-name="T25">看失衡節點</text:span><text:span text:style-name="T1">哪邊較高 → L 或 R</text:span></text:p>
            <text:p text:style-name="P6"><text:span text:style-name="T2">Step 3：</text:span><text:span text:style-name="T25">看新增節點</text:span><text:span text:style-name="T1">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4"/>
      <text:p text:style-name="P73">LL 旋轉詳解（右旋）</text:p>
      <text:p text:style-name="P47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4">旋轉前（失衡）</text:p>
            <text:p text:style-name="P48"><text:s text:c="4"/>60 <text:s/>(<text:span text:style-name="T3">BF=+2</text:span> ❌)</text:p>
            <text:p text:style-name="P48"><text:s text:c="3"/>/</text:p>
            <text:p text:style-name="P48"><text:s/>25 <text:s/>(<text:span text:style-name="T3">BF=+1</text:span>)</text:p>
            <text:p text:style-name="P48"><text:s/>/</text:p>
            <text:p text:style-name="P48">15</text:p>
          </table:table-cell>
          <table:table-cell table:style-name="表格10.B1" office:value-type="string">
            <text:p text:style-name="P75">→</text:p>
          </table:table-cell>
          <table:table-cell table:style-name="表格10.C1" office:value-type="string">
            <text:p text:style-name="P76">右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4">旋轉前（失衡）</text:p>
            <text:p text:style-name="P48">15 <text:s/>(<text:span text:style-name="T3">BF=−2</text:span> ❌)</text:p>
            <text:p text:style-name="P48"><text:s text:c="2"/>\</text:p>
            <text:p text:style-name="P48"><text:s/>25 <text:s/>(<text:span text:style-name="T3">BF=−1</text:span>)</text:p>
            <text:p text:style-name="P48"><text:s text:c="3"/>\</text:p>
            <text:p text:style-name="P48"><text:s text:c="4"/>60</text:p>
          </table:table-cell>
          <table:table-cell table:style-name="表格11.B1" office:value-type="string">
            <text:p text:style-name="P75">→</text:p>
          </table:table-cell>
          <table:table-cell table:style-name="表格11.C1" office:value-type="string">
            <text:p text:style-name="P76">左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LR 旋轉詳解（先左旋，再右旋）</text:p>
      <text:p text:style-name="P47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4">原始（失衡）</text:p>
            <text:p text:style-name="P48"><text:s text:c="2"/>60 (<text:span text:style-name="T3">BF=+2 </text:span>❌)</text:p>
            <text:p text:style-name="P48"><text:s text:c="2"/>/</text:p>
            <text:p text:style-name="P48">25 (<text:span text:style-name="T4">BF=−1</text:span>)</text:p>
            <text:p text:style-name="P48"><text:s text:c="2"/>\</text:p>
            <text:p text:style-name="P48"><text:s text:c="2"/>30</text:p>
          </table:table-cell>
          <table:table-cell table:style-name="表格12.B1" office:value-type="string">
            <text:p text:style-name="P77">→</text:p>
          </table:table-cell>
          <table:table-cell table:style-name="表格12.C1" office:value-type="string">
            <text:p text:style-name="P78">Step1: 左旋25</text:p>
            <text:p text:style-name="P48"><text:s text:c="2"/>60</text:p>
            <text:p text:style-name="P48"><text:s text:c="2"/>/</text:p>
            <text:p text:style-name="P79">30</text:p>
            <text:p text:style-name="P79">/</text:p>
            <text:p text:style-name="P79">25</text:p>
          </table:table-cell>
          <table:table-cell table:style-name="表格12.B1" office:value-type="string">
            <text:p text:style-name="P77">→</text:p>
          </table:table-cell>
          <table:table-cell table:style-name="表格12.E1" office:value-type="string">
            <text:p text:style-name="P76">Step2: 右旋60</text:p>
            <text:p text:style-name="P48"><text:s text:c="4"/>30 (BF=0 ✓)</text:p>
            <text:p text:style-name="P48"><text:s text:c="3"/>/ <text:s/>\</text:p>
            <text:p text:style-name="P48"><text:s/>25 <text:s text:c="2"/>60</text:p>
          </table:table-cell>
        </table:table-row>
      </table:table>
      <text:p text:style-name="P80"/>
      <text:p text:style-name="P6"><text:span text:style-name="T50">RL 旋轉</text:span><text:span text:style-name="T2">：</text:span><text:span text:style-name="T24">方法與 LR 完全相反</text:span><text:span text:style-name="T1">。失衡在右邊，新增節點在右子節點的左邊。</text:span><text:span text:style-name="T2"> 先右旋，再左旋。</text:span></text:p>
      <text:p text:style-name="P7"/>
      <text:h text:style-name="P46" text:outline-level="2">3.3 AVL 時間複雜度</text:h>
      <text:p text:style-name="P47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<text:span text:style-name="T51">log n</text:span>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<text:span text:style-name="T51">log n</text:span>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<text:span text:style-name="T51">log n</text:span>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2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8"><text:s text:c="8"/>25 <text:s/>(<text:span text:style-name="T51">BF=−1</text:span>)</text:p>
            <text:p text:style-name="P48"><text:s text:c="7"/>/ <text:s/>\</text:p>
            <text:p text:style-name="P48"><text:s text:c="5"/>15 <text:s text:c="3"/>60 <text:s/>(<text:span text:style-name="T51">BF=0</text:span>)</text:p>
            <text:p text:style-name="P48"><text:s text:c="10"/>/ <text:s/>\</text:p>
            <text:p text:style-name="P48"><text:s text:c="8"/>30 <text:s text:c="3"/>80</text:p>
          </table:table-cell>
        </table:table-row>
      </table:table>
      <text:p text:style-name="P7"/>
      <text:h text:style-name="P50" text:outline-level="2">步驟一：插入 90</text:h>
      <text:list text:style-name="WWNum3">
        <text:list-item text:start-value="1">
          <text:p text:style-name="P81">90 &gt; 25 → 往右；90 &gt; 60 → 往右；90 &gt; 80 → 放至 80 的右子</text:p>
        </text:list-item>
        <text:list-item>
          <text:p text:style-name="P81">往上檢查：到達節點 25 時，BF = 1 − 3 = −2，超過限制，失衡！</text:p>
        </text:list-item>
        <text:list-item>
          <text:p text:style-name="P81">失衡節點 25 → 右邊太高 → 新節點 90 在右子樹的右邊 → RR 失衡</text:p>
        </text:list-item>
        <text:list-item>
          <text:p text:style-name="P81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4">插入後（失衡）</text:p>
            <text:p text:style-name="P48"><text:s text:c="2"/>25 (<text:span text:style-name="T3">BF=−2</text:span> ❌)</text:p>
            <text:p text:style-name="P48"><text:s text:c="2"/>/ \</text:p>
            <text:p text:style-name="P48">15 <text:s text:c="2"/>60</text:p>
            <text:p text:style-name="P48"><text:s text:c="4"/>/ <text:s/>\</text:p>
            <text:p text:style-name="P48"><text:s text:c="2"/>30 <text:s text:c="2"/>80</text:p>
            <text:p text:style-name="P48"><text:s text:c="9"/>\</text:p>
            <text:p text:style-name="P48"><text:s text:c="9"/>90</text:p>
          </table:table-cell>
          <table:table-cell table:style-name="表格15.B1" office:value-type="string">
            <text:p text:style-name="P82">左旋→</text:p>
          </table:table-cell>
          <table:table-cell table:style-name="表格15.C1" office:value-type="string">
            <text:p text:style-name="P76">RR 左旋後（平衡）</text:p>
            <text:p text:style-name="P48"><text:s text:c="7"/>60 <text:s/>(BF=0 ✓)</text:p>
            <text:p text:style-name="P48"><text:s text:c="6"/>/ <text:s/>\</text:p>
            <text:p text:style-name="P48"><text:s text:c="4"/>25 <text:s text:c="3"/>80</text:p>
            <text:p text:style-name="P48"><text:s text:c="3"/>/ <text:s/>\ <text:s text:c="4"/>\</text:p>
            <text:p text:style-name="P48"><text:s/>15 <text:s/><text:span text:style-name="T3">30 </text:span><text:s text:c="3"/>90</text:p>
          </table:table-cell>
        </table:table-row>
      </table:table>
      <text:p text:style-name="P6"><text:span text:style-name="T1">旋轉後：</text:span><text:span text:style-name="T20">60(25(15,30), 80(−,90))</text:span></text:p>
      <text:p text:style-name="P7"/>
      <text:h text:style-name="P50" text:outline-level="2">步驟二：插入 85</text:h>
      <text:list text:continue-numbering="true" text:style-name="WWNum3">
        <text:list-item>
          <text:p text:style-name="P81">85 &gt; 60 → 右；85 &gt; 80 → 右；85 &lt; 90 → 放至 90 的左子</text:p>
        </text:list-item>
        <text:list-item>
          <text:p text:style-name="P81"><text:span text:style-name="T3">往上檢查</text:span>：<text:span text:style-name="T3">到達節點 80 時</text:span>，<text:span text:style-name="T52">BF = 0 − 2 = −2，失衡！</text:span></text:p>
        </text:list-item>
        <text:list-item>
          <text:p text:style-name="P81">失衡節點 80 → 右邊太高 → 新節點 85 在右子樹 90 的左邊 → RL 失衡</text:p>
        </text:list-item>
        <text:list-item>
          <text:p text:style-name="P81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4">插入後（失衡）</text:p>
            <text:p text:style-name="P48">80 (BF=−2 ❌)</text:p>
            <text:p text:style-name="P48"><text:s text:c="2"/>\</text:p>
            <text:p text:style-name="P48"><text:s text:c="2"/><text:span text:style-name="T3">90</text:span></text:p>
            <text:p text:style-name="P79"><text:s text:c="2"/>/</text:p>
            <text:p text:style-name="P79">85</text:p>
          </table:table-cell>
          <table:table-cell table:style-name="表格16.B1" office:value-type="string">
            <text:p text:style-name="P83">→</text:p>
          </table:table-cell>
          <table:table-cell table:style-name="表格16.C1" office:value-type="string">
            <text:p text:style-name="P78">Step1: 右旋90</text:p>
            <text:p text:style-name="P48">80</text:p>
            <text:p text:style-name="P48"><text:s text:c="2"/>\</text:p>
            <text:p text:style-name="P48"><text:s/><text:span text:style-name="T18"><text:s/>85</text:span></text:p>
            <text:p text:style-name="P84"><text:s text:c="4"/>\</text:p>
            <text:p text:style-name="P84"><text:s text:c="4"/>90</text:p>
          </table:table-cell>
          <table:table-cell table:style-name="表格16.B1" office:value-type="string">
            <text:p text:style-name="P83">→</text:p>
          </table:table-cell>
          <table:table-cell table:style-name="表格16.E1" office:value-type="string">
            <text:p text:style-name="P76">Step2: 左旋80</text:p>
            <text:p text:style-name="P48"><text:s text:c="4"/>85 (BF=0 ✓)</text:p>
            <text:p text:style-name="P48"><text:s text:c="3"/>/ <text:s/>\</text:p>
            <text:p text:style-name="P48"><text:s/>80 <text:s text:c="2"/>90</text:p>
          </table:table-cell>
        </table:table-row>
      </table:table>
      <text:p text:style-name="P6"><text:span text:style-name="T1">旋轉後完整樹：</text:span><text:span text:style-name="T20">60(25(15,30), 85(80,90))</text:span></text:p>
      <text:p text:style-name="P7"/>
      <text:h text:style-name="P50" text:outline-level="2">步驟三：刪除 15</text:h>
      <text:list text:continue-numbering="true" text:style-name="WWNum3">
        <text:list-item>
          <text:p text:style-name="P81">15 為葉節點（無任何子節點）→ 直接刪除</text:p>
        </text:list-item>
        <text:list-item>
          <text:p text:style-name="P85"><text:soft-page-break/><text:span text:style-name="T50">往上重新計算</text:span><text:span text:style-name="T9">所有節點</text:span><text:span text:style-name="T53">的 </text:span><text:span text:style-name="T54">BF 值</text:span></text:p>
        </text:list-item>
      </text:list>
      <text:p text:style-name="P7"/>
      <text:p text:style-name="P86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8"><text:s text:c="9"/>60 (BF=0)</text:p>
            <text:p text:style-name="P48"><text:s text:c="8"/>/ <text:s text:c="4"/>\</text:p>
            <text:p text:style-name="P48"><text:s text:c="5"/>25(BF=−1) <text:s/>85(BF=0)</text:p>
            <text:p text:style-name="P48"><text:s text:c="8"/>\ <text:s text:c="5"/>/ <text:s text:c="4"/>\</text:p>
            <text:p text:style-name="P48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✏️ 關於 BF 計算的注意事項</text:p>
            <text:p text:style-name="P47">考場筆記若出現 60(-1) 的標記，代表 BF=−1。<text:span text:style-name="T18">本範例最終計算後 60 的 BF 應為 0</text:span>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47">紅黑樹是 <text:span text:style-name="T55">BST</text:span> 的一種，每個節點除了<text:span text:style-name="T56">儲存資料</text:span>外，還<text:span text:style-name="T57">額外儲存一個顏色資訊（Red 或 Black）</text:span>。，<text:span text:style-name="T58">透過一套顏色規則來確保樹的高度</text:span>維持在 <text:span text:style-name="T59">O(log n)</text:span>，避免 BST 退化的問題。</text:p>
      <text:p text:style-name="P7"/>
      <text:h text:style-name="P50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87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88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<text:span text:style-name="T60">紅色節點的子節點必須是黑色</text:span>（<text:span text:style-name="T61">紅不接紅</text:span>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<text:span text:style-name="T62">從任一節點</text:span><text:span text:style-name="T58">到其後代 NIL</text:span> 的<text:span text:style-name="T59">所有路徑</text:span>，<text:span text:style-name="T63">經過的黑色節點數目相同</text:span>（<text:span text:style-name="T56">Black Height 相同</text:span>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46" text:outline-level="2">5.2 為什麼這些規則能保證 O(log n)？</text:h>
      <text:p text:style-name="P6"><text:span text:style-name="T2">關鍵推論：</text:span><text:span text:style-name="T1">由於「</text:span><text:span text:style-name="T64">紅不能接紅</text:span><text:span text:style-name="T1">」，</text:span><text:span text:style-name="T65">任何路徑上紅節點不能連續出現</text:span><text:span text:style-name="T1">。因此，</text:span><text:span text:style-name="T66">最長路徑最多是「黑紅黑紅黑紅...」的交替排列</text:span><text:span text:style-name="T1">，其</text:span><text:span text:style-name="T67">長度不超過黑色節點數的兩倍</text:span><text:span text:style-name="T1">。加上「</text:span><text:span text:style-name="T68">黑高度相同</text:span><text:span text:style-name="T1">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9">樹高 h ≤ 2 × log₂(n+1)，即<text:span text:style-name="T69"> h = O(log n)</text:span><text:span text:style-name="T70">(先記! 後補詳細理解)</text:span></text:p>
          </table:table-cell>
        </table:table-row>
      </table:table>
      <text:p text:style-name="P7"/>
      <text:h text:style-name="P46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<text:span text:style-name="T71">更嚴格</text:span>（<text:span text:style-name="T72">|BF| ≤ 1</text:span>）</text:p>
          </table:table-cell>
          <table:table-cell table:style-name="表格21.A2" office:value-type="string">
            <text:p text:style-name="P9"><text:span text:style-name="T73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<text:span text:style-name="T71">更矮</text:span>（查找路徑更短）</text:p>
          </table:table-cell>
          <table:table-cell table:style-name="表格21.A3" office:value-type="string">
            <text:p text:style-name="P9"><text:span text:style-name="T73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<text:span text:style-name="T71">稍快</text:span>（<text:span text:style-name="T74">因樹較矮</text:span>）</text:p>
          </table:table-cell>
          <table:table-cell table:style-name="表格21.A3" office:value-type="string">
            <text:p text:style-name="P9"><text:span text:style-name="T73">稍慢</text:span>（<text:span text:style-name="T74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65">Red-Black Tree </text:span><text:span text:style-name="T1">本質上是 </text:span><text:span text:style-name="T66">(2,4)-Tree（又稱 2-3-4 Tree</text:span><text:span text:style-name="T1">）的</text:span><text:span text:style-name="T75">二元樹表示法</text:span><text:span text:style-name="T1">。理解這個對應關係，有助於真正理解為什麼 RBT 要制定那些看似奇怪的規則。</text:span></text:p>
      <text:p text:style-name="P7"/>
      <text:h text:style-name="P46" text:outline-level="2">6.1 什麼是 (2,4)-Tree？</text:h>
      <text:p text:style-name="P47"><text:span text:style-name="T55">(2,4)-Tree 是一種 B-Tree</text:span>，<text:span text:style-name="T57">每個節點可以儲存 1 到 3 個鍵值</text:span>，並<text:span text:style-name="T76">有 2 到 4 個子節點</text:span><text:span text:style-name="T77">(</text:span><text:span text:style-name="T78">命名規則是看「子節點數量」</text:span><text:span text:style-name="T77">)</text:span>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2 個子節點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3 個子節點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4 個子節點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/>
      <text:p text:style-name="P6"><text:span text:style-name="T2">最重要特性：</text:span><text:span text:style-name="T1">所有葉節點都在同一層（完全平衡），這正是 RBT「黑高度相同」規則的來源。</text:span></text:p>
      <text:p text:style-name="P7"/>
      <text:h text:style-name="P46" text:outline-level="2">6.2 (2,4)-Tree ↔ Red-Black Tree 對應表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8">(2,4)-Tree 節點</text:p>
          </table:table-cell>
          <table:table-cell table:style-name="表格23.A1" office:value-type="string">
            <text:p text:style-name="P8">RBT 對應結構</text:p>
          </table:table-cell>
          <table:table-cell table:style-name="表格23.A1" office:value-type="string">
            <text:p text:style-name="P8">說明</text:p>
          </table:table-cell>
        </table:table-row>
        <table:table-row table:style-name="表格23.1">
          <table:table-cell table:style-name="表格23.A2" office:value-type="string">
            <text:p text:style-name="P9">2-node [X]</text:p>
          </table:table-cell>
          <table:table-cell table:style-name="表格23.A2" office:value-type="string">
            <text:p text:style-name="P9">X(黑色)</text:p>
          </table:table-cell>
          <table:table-cell table:style-name="表格23.A2" office:value-type="string">
            <text:p text:style-name="P9">單一黑色節點</text:p>
          </table:table-cell>
        </table:table-row>
        <table:table-row table:style-name="表格23.1">
          <table:table-cell table:style-name="表格23.A3" office:value-type="string">
            <text:p text:style-name="P9">3-node [X | Y]</text:p>
          </table:table-cell>
          <table:table-cell table:style-name="表格23.A3" office:value-type="string">
            <text:p text:style-name="P9">X(黑) → Y(紅) 或 Y(黑) → X(紅)</text:p>
          </table:table-cell>
          <table:table-cell table:style-name="表格23.A3" office:value-type="string">
            <text:p text:style-name="P9">一黑一紅，紅節點依附在黑節點旁</text:p>
          </table:table-cell>
        </table:table-row>
        <table:table-row table:style-name="表格23.1">
          <table:table-cell table:style-name="表格23.A2" office:value-type="string">
            <text:p text:style-name="P9">4-node [X | Y | Z]</text:p>
          </table:table-cell>
          <table:table-cell table:style-name="表格23.A2" office:value-type="string">
            <text:p text:style-name="P9">Y(黑)，X(紅)，Z(紅)</text:p>
          </table:table-cell>
          <table:table-cell table:style-name="表格23.A2" office:value-type="string">
            <text:p text:style-name="P9">黑節點居中，左右各一紅節點</text:p>
          </table:table-cell>
        </table:table-row>
        <table:table-row table:style-name="表格23.1">
          <table:table-cell table:style-name="表格23.A3" office:value-type="string">
            <text:p text:style-name="P9">分裂（Split）</text:p>
          </table:table-cell>
          <table:table-cell table:style-name="表格23.A3" office:value-type="string">
            <text:p text:style-name="P9">變色 + 旋轉</text:p>
          </table:table-cell>
          <table:table-cell table:style-name="表格23.A3" office:value-type="string">
            <text:p text:style-name="P9">4-node 分裂對應 RBT 的顏色翻轉</text:p>
          </table:table-cell>
        </table:table-row>
        <table:table-row table:style-name="表格23.1">
          <table:table-cell table:style-name="表格23.A2" office:value-type="string">
            <text:p text:style-name="P9">所有葉節點同層</text:p>
          </table:table-cell>
          <table:table-cell table:style-name="表格23.A2" office:value-type="string">
            <text:p text:style-name="P9">所有路徑黑高度相同</text:p>
          </table:table-cell>
          <table:table-cell table:style-name="表格23.A2" office:value-type="string">
            <text:p text:style-name="P9">RBT 規則五的來源</text:p>
          </table:table-cell>
        </table:table-row>
      </table:table>
      <text:p text:style-name="P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📝 考試速記</text:p>
            <text:p text:style-name="P6"><text:span text:style-name="T2">紅黑樹是什麼的二元表示？</text:span><text:span text:style-name="T34"> → (2,4)-Tree</text:span></text:p>
            <text:p text:style-name="P6"><text:span text:style-name="T2">為何「紅不能接紅」？</text:span><text:span text:style-name="T1"> → 紅節點代表與父節點共同組成一個 (2,4)-node，連續兩個紅表示超過 4-node 上限</text:span></text:p>
            <text:p text:style-name="P6"><text:span text:style-name="T2">為何「黑高度相同」？</text:span><text:span text:style-name="T1"> → 因為 (2,4)-Tree 所有葉節點在同一層，轉換成 RBT 後，黑色節點就對應了這個高度</text:span></text:p>
          </table:table-cell>
        </table:table-row>
      </table:table>
      <text:p text:style-name="P7"/>
      <text:h text:style-name="P46" text:outline-level="2">6.3 (2,4)-Tree 高度公式</text:h>
      <text:p text:style-name="P47">若 (2,4)-Tree 有 n 個鍵值，其高度 h 滿足：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0">log₂(n+1) ≤ h ≤ log₂(n+1) <text:s/>→ <text:s/>(2,4)-tree 高度 h，使 hRB ≤ 2h = O(log n)</text:p>
          </table:table-cell>
        </table:table-row>
      </table:table>
      <text:p text:style-name="P7"/>
      <text:p text:style-name="Standard"/>
      <text:h text:style-name="P5" text:outline-level="1">七、RBT 實作範例：115 關務 Q4（依序插入 1~8）</text:h>
      <text:p text:style-name="P47">本題展示 BST 與 RBT 插入相同資料後的巨大差異，是理解紅黑樹必要性的最佳範例。</text:p>
      <text:p text:style-name="P7"/>
      <text:h text:style-name="P50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4">BST 退化成右斜樹（鏈結串列）❌</text:p>
            <text:p text:style-name="P48">1</text:p>
            <text:p text:style-name="P48"><text:s/>\</text:p>
            <text:p text:style-name="P48"><text:s text:c="2"/>2</text:p>
            <text:p text:style-name="P48"><text:s text:c="3"/>\</text:p>
            <text:p text:style-name="P48"><text:s text:c="4"/>3</text:p>
            <text:p text:style-name="P48"><text:s text:c="5"/>\</text:p>
            <text:p text:style-name="P48"><text:s text:c="6"/>4</text:p>
            <text:p text:style-name="P48"><text:s text:c="7"/>\</text:p>
            <text:p text:style-name="P48"><text:s text:c="8"/>5 → ... → 8</text:p>
            <text:p text:style-name="P91"/>
            <text:p text:style-name="P74">高度 = 8 = O(n)，搜尋最差需走 8 步</text:p>
          </table:table-cell>
        </table:table-row>
      </table:table>
      <text:p text:style-name="P14"/>
      <text:h text:style-name="P92" text:outline-level="2">RBT 依序插入 1, 2, 3, 4, 5, 6, 7, 8 的過程</text:h>
      <text:p text:style-name="P47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86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6">RBT 平衡樹（高度 ≈ 4）✓</text:p>
            <text:p text:style-name="P48"><text:s text:c="14"/>4(黑)</text:p>
            <text:p text:style-name="P48"><text:s text:c="11"/>/ <text:s text:c="7"/>\</text:p>
            <text:p text:style-name="P48"><text:s text:c="8"/>2(紅) <text:s text:c="7"/>6(紅)</text:p>
            <text:p text:style-name="P48"><text:s text:c="7"/>/ <text:s text:c="3"/>\ <text:s text:c="6"/>/ <text:s text:c="3"/>\</text:p>
            <text:p text:style-name="P48"><text:s text:c="5"/>1(黑) <text:s/>3(黑) 5(黑) <text:s/>7(黑)</text:p>
            <text:p text:style-name="P48"><text:s text:c="30"/>\</text:p>
            <text:p text:style-name="P48"><text:s text:c="30"/>8(紅)</text:p>
            <text:p text:style-name="P91"/>
            <text:p text:style-name="P76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46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50" text:outline-level="2">8.2 Heap 的陣列表示法（必背公式）</text:h>
      <text:p text:style-name="P47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3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20">[90, 80, 70, 40, 30, 20, 10]（index 從 1 開始）</text:span></text:p>
      <text:list text:continue-numbering="true" text:style-name="WWNum3">
        <text:list-item>
          <text:p text:style-name="P81">A[5] = 30；A[5] 的父節點 = A[⌊5/2⌋] = A[2] = 80</text:p>
        </text:list-item>
        <text:list-item>
          <text:p text:style-name="P81">A[3] = 70；A[3] 的左子 = A[6] = 20；右子 = A[7] = 10</text:p>
        </text:list-item>
      </text:list>
      <text:p text:style-name="P7"/>
      <text:h text:style-name="P46" text:outline-level="2">8.3 插入（Up-Heap / Heapify Up）</text:h>
      <text:list text:continue-list="list2332657880" text:style-name="WWNum2">
        <text:list-item>
          <text:p text:style-name="P49">將新元素放在陣列最後（維持完全二元樹）</text:p>
        </text:list-item>
        <text:list-item>
          <text:p text:style-name="P49">與父節點比較：若違反 Heap 規則，與父節點交換</text:p>
        </text:list-item>
        <text:list-item>
          <text:p text:style-name="P49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46" text:outline-level="2">8.4 刪除最大值（Down-Heap / Heapify Down）</text:h>
      <text:list text:continue-numbering="true" text:style-name="WWNum2">
        <text:list-item>
          <text:p text:style-name="P49">取出根節點（最大值）</text:p>
        </text:list-item>
        <text:list-item>
          <text:p text:style-name="P49">將陣列最後一個元素移至根的位置</text:p>
        </text:list-item>
        <text:list-item>
          <text:p text:style-name="P49">與兩個子節點中較大者比較：若違反規則，與較大子節點交換</text:p>
        </text:list-item>
        <text:list-item>
          <text:p text:style-name="P49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46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❓ 為什麼是 O(n log n) 而不是 O(n²)？</text:p>
            <text:p text:style-name="P47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46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5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46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4">O(1) &lt; O(log n) &lt; O(n) &lt; O(n log n) &lt; O(n²) &lt; O(2ⁿ) &lt; O(n!)</text:p>
          </table:table-cell>
        </table:table-row>
      </table:table>
      <text:p text:style-name="P7"/>
      <text:h text:style-name="P46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50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50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50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5">父節點 = ⌊i/2⌋ <text:s text:c="7"/>左子 = 2i <text:s text:c="7"/>右子 = 2i+1</text:p>
          </table:table-cell>
        </table:table-row>
      </table:table>
      <text:p text:style-name="P7"/>
      <text:h text:style-name="P46" text:outline-level="2">10.6 各題型答題模板</text:h>
      <text:p text:style-name="P73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73">問：為何 RBT 高度是 O(log n)？</text:p>
      <text:p text:style-name="P47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73">問：(2,4)-Tree 與 RBT 的關係？</text:p>
      <text:p text:style-name="P47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96">BST</text:p>
                  <text:p text:style-name="P47">左 &lt; 根 &lt; 右</text:p>
                  <text:p text:style-name="P47">刪除：葉→直刪 / 一子→接上 / 兩子→中序後繼</text:p>
                  <text:p text:style-name="P47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97">AVL</text:p>
                  <text:p text:style-name="P47">BF = 左高 − 右高，|BF| ≤ 1</text:p>
                  <text:p text:style-name="P47">LL→右旋　RR→左旋</text:p>
                  <text:p text:style-name="P47">LR→左右旋　RL→右左旋</text:p>
                  <text:p text:style-name="P47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98">Heap</text:p>
                  <text:p text:style-name="P47">完全二元樹 + 父 ≥ 子（Max Heap）</text:p>
                  <text:p text:style-name="P48">父=i/2　左=2i　右=2i+1</text:p>
                  <text:p text:style-name="P47">插入 O(log n)　取最大 O(1)</text:p>
                  <text:p text:style-name="P47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99">RBT（紅黑樹）</text:p>
                  <text:p text:style-name="P47">① 非紅即黑　② 根黑　③ NIL黑</text:p>
                  <text:p text:style-name="P47">④ 紅不接紅　⑤ 黑高度相同</text:p>
                  <text:p text:style-name="P47">高度 h ≤ 2log(n+1) = O(log n)</text:p>
                  <text:p text:style-name="P47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00">(2,4)-Tree ↔ RBT</text:p>
                  <text:p text:style-name="P47">2-node = 黑節點</text:p>
                  <text:p text:style-name="P47">3-node = 黑 + 紅</text:p>
                  <text:p text:style-name="P47">4-node = 黑 + 左紅 + 右紅</text:p>
                  <text:p text:style-name="P47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1">Priority Queue</text:p>
                  <text:p text:style-name="P47">不是 FIFO，是優先權高先出</text:p>
                  <text:p text:style-name="P47">以 Heap 實作最佳</text:p>
                  <text:p text:style-name="P47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102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97</meta:editing-cycles>
    <meta:creation-date>2026-05-30T02:12:46.572000000</meta:creation-date>
    <dc:date>2026-05-31T18:00:27.942726000</dc:date>
    <meta:generator>LibreOffice/26.2.3.2$Windows_X86_64 LibreOffice_project/70e089b17412e4cb7773e41413306b17a2328c34</meta:generator>
    <meta:editing-duration>PT11H5M12S</meta:editing-duration>
    <meta:document-statistic meta:table-count="64" meta:image-count="0" meta:object-count="0" meta:page-count="21" meta:paragraph-count="777" meta:word-count="7439" meta:character-count="12426" meta:non-whitespace-character-count="10263"/>
  </office:meta>
</office:document-meta>
</file>