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56cm" fo:margin-top="0cm" fo:margin-bottom="0cm" table:align="left" style:writing-mode="page"/>
    </style:style>
    <style:style style:name="表格1.A" style:family="table-column">
      <style:table-column-properties style:column-width="16.933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1.A2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1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14" style:family="table">
      <style:table-properties style:width="16.933cm" fo:margin-left="0.056cm" fo:margin-top="0cm" fo:margin-bottom="0cm" table:align="left" style:writing-mode="page"/>
    </style:style>
    <style:style style:name="表格14.A" style:family="table-column">
      <style:table-column-properties style:column-width="16.933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15" style:family="table">
      <style:table-properties style:width="16.933cm" fo:margin-left="0.056cm" fo:margin-top="0cm" fo:margin-bottom="0cm" table:align="left" style:writing-mode="page"/>
    </style:style>
    <style:style style:name="表格15.A" style:family="table-column">
      <style:table-column-properties style:column-width="16.93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16" style:family="table">
      <style:table-properties style:width="16.933cm" fo:margin-left="0.056cm" fo:margin-top="0cm" fo:margin-bottom="0cm" table:align="left" style:writing-mode="page"/>
    </style:style>
    <style:style style:name="表格16.A" style:family="table-column">
      <style:table-column-properties style:column-width="16.93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17" style:family="table">
      <style:table-properties style:width="16.933cm" fo:margin-left="0.056cm" fo:margin-top="0cm" fo:margin-bottom="0cm" table:align="left" style:writing-mode="page"/>
    </style:style>
    <style:style style:name="表格17.A" style:family="table-column">
      <style:table-column-properties style:column-width="16.933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18" style:family="table">
      <style:table-properties style:width="16.933cm" fo:margin-left="0.056cm" fo:margin-top="0cm" fo:margin-bottom="0cm" table:align="left" style:writing-mode="page"/>
    </style:style>
    <style:style style:name="表格18.A" style:family="table-column">
      <style:table-column-properties style:column-width="16.93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19" style:family="table">
      <style:table-properties style:width="16.933cm" fo:margin-left="0.056cm" fo:margin-top="0cm" fo:margin-bottom="0cm" table:align="left" style:writing-mode="page"/>
    </style:style>
    <style:style style:name="表格19.A" style:family="table-column">
      <style:table-column-properties style:column-width="16.933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20" style:family="table">
      <style:table-properties style:width="16.933cm" fo:margin-left="0.056cm" fo:margin-top="0cm" fo:margin-bottom="0cm" table:align="left" style:writing-mode="page"/>
    </style:style>
    <style:style style:name="表格20.A" style:family="table-column">
      <style:table-column-properties style:column-width="16.933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21" style:family="table">
      <style:table-properties style:width="16.933cm" fo:margin-left="0.056cm" fo:margin-top="0cm" fo:margin-bottom="0cm" table:align="left" style:writing-mode="page"/>
    </style:style>
    <style:style style:name="表格21.A" style:family="table-column">
      <style:table-column-properties style:column-width="16.933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22" style:family="table">
      <style:table-properties style:width="16.933cm" fo:margin-left="0.056cm" fo:margin-top="0cm" fo:margin-bottom="0cm" table:align="left" style:writing-mode="page"/>
    </style:style>
    <style:style style:name="表格22.A" style:family="table-column">
      <style:table-column-properties style:column-width="16.933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23" style:family="table">
      <style:table-properties style:width="16.933cm" fo:margin-left="0.056cm" fo:margin-top="0cm" fo:margin-bottom="0cm" table:align="left" style:writing-mode="page"/>
    </style:style>
    <style:style style:name="表格23.A" style:family="table-column">
      <style:table-column-properties style:column-width="16.933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24" style:family="table">
      <style:table-properties style:width="16.933cm" fo:margin-left="0.056cm" fo:margin-top="0cm" fo:margin-bottom="0cm" table:align="left" style:writing-mode="page"/>
    </style:style>
    <style:style style:name="表格24.A" style:family="table-column">
      <style:table-column-properties style:column-width="16.933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P1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2" style:family="paragraph" style:parent-style-name="Heading_20_3">
      <style:paragraph-properties fo:margin-top="0.318cm" fo:margin-bottom="0.123cm" style:contextual-spacing="false"/>
    </style:style>
    <style:style style:name="P3" style:family="paragraph" style:parent-style-name="Standard">
      <style:paragraph-properties fo:margin-top="2.999cm" fo:margin-bottom="0cm" style:contextual-spacing="false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6" style:family="paragraph" style:parent-style-name="Standard">
      <style:paragraph-properties fo:margin-top="0.106cm" fo:margin-bottom="0.353cm" style:contextual-spacing="false" fo:text-align="center" style:justify-single-word="false"/>
    </style:style>
    <style:style style:name="P7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8" style:family="paragraph" style:parent-style-name="Standard">
      <style:paragraph-properties fo:margin-top="0.035cm" fo:margin-bottom="0.106cm" style:contextual-spacing="false" fo:line-height="0.459cm"/>
    </style:style>
    <style:style style:name="P9" style:family="paragraph" style:parent-style-name="Standard">
      <style:paragraph-properties fo:margin-top="0cm" fo:margin-bottom="0.042cm" style:contextual-spacing="false" fo:line-height="0.455cm"/>
    </style:style>
    <style:style style:name="P10" style:family="paragraph" style:parent-style-name="Standard">
      <style:paragraph-properties fo:margin-top="0.042cm" fo:margin-bottom="0.042cm" style:contextual-spacing="false" fo:line-height="0.455cm"/>
    </style:style>
    <style:style style:name="P11" style:family="paragraph" style:parent-style-name="Standard">
      <style:paragraph-properties fo:margin-top="0cm" fo:margin-bottom="0.053cm" style:contextual-spacing="false" fo:line-height="0.504cm"/>
    </style:style>
    <style:style style:name="P12" style:family="paragraph" style:parent-style-name="Standard">
      <style:paragraph-properties fo:margin-top="0.053cm" fo:margin-bottom="0.053cm" style:contextual-spacing="false" fo:line-height="0.504cm"/>
    </style:style>
    <style:style style:name="P13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c96a1e" loext:opacity="100%" style:font-name="Microsoft JhengHei" fo:font-size="8pt" fo:font-style="normal" fo:font-weight="bold" style:font-name-asian="Microsoft JhengHei2" style:font-size-asian="8pt" style:font-style-asian="normal" style:font-weight-asian="bold" style:font-name-complex="Microsoft JhengHei2" style:font-size-complex="8pt" style:font-style-complex="normal" style:font-weight-complex="bold"/>
    </style:style>
    <style:style style:name="T5" style:family="text">
      <style:text-properties fo:color="#1f3a5c" loext:opacity="100%" style:font-name="Microsoft JhengHei" fo:font-size="25pt" fo:font-weight="bold" style:font-name-asian="Microsoft JhengHei2" style:font-size-asian="25pt" style:font-weight-asian="bold" style:font-name-complex="Microsoft JhengHei2" style:font-size-complex="25pt" style:font-weight-complex="bold"/>
    </style:style>
    <style:style style:name="T6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" style:family="text">
      <style:text-properties fo:color="#555555" loext:opacity="100%" style:font-name="Microsoft JhengHei" fo:font-size="11pt" fo:font-weight="normal" style:font-name-asian="Microsoft JhengHei2" style:font-size-asian="11pt" style:font-weight-asian="normal" style:font-name-complex="Microsoft JhengHei2" style:font-size-complex="11pt" style:font-weight-complex="normal"/>
    </style:style>
    <style:style style:name="T8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9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10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13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4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5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1">公職考試 · 資訊類</text:span></text:p>
      <text:p text:style-name="P5"><text:span text:style-name="T5">網路與資安　克漏字練習</text:span></text:p>
      <text:p text:style-name="P6"><text:span text:style-name="T7">Fill-in-the-Blank · 主動回想自我測驗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><text:span text:style-name="T9">✏️ <text:s/></text:span><text:span text:style-name="T2">克漏字練習說明</text:span></text:p>
            <text:p text:style-name="P9"><text:span text:style-name="T3">使用方式：</text:span><text:span text:style-name="T10">每個橙色括號（　　 n 　）都是一個空格，請先蓋住最後的「解答篇」，憑記憶把答案寫進括號，再逐篇對照核對。</text:span></text:p>
            <text:p text:style-name="P10"><text:span text:style-name="T3">建議節奏：</text:span><text:span text:style-name="T10">第一輪允許翻最終筆記找答案；第二輪闔上筆記只憑記憶；第三輪只挑前兩輪寫錯的題號。間隔 1 天、3 天、7 天各做一次（間隔重複）效果最佳。</text:span></text:p>
            <text:p text:style-name="P10"><text:span text:style-name="T3">配對使用：</text:span><text:span text:style-name="T10">本練習的題號與「最終整合筆記」的篇章一一對應，寫錯時直接回該篇複習。</text:span></text:p>
          </table:table-cell>
        </table:table-row>
      </table:table>
      <text:h text:style-name="P1" text:outline-level="1"><text:span text:style-name="T12">第 一 篇　網路基礎架構</text:span></text:h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<text:span text:style-name="T9">📝 <text:s/></text:span><text:span text:style-name="T13">口訣與觀念填空</text:span></text:p>
            <text:p text:style-name="P11"><text:span text:style-name="T10">TCP/IP 四層由上而下：應用層→給人用、傳輸層→怎麼送、網路層→走哪條路、連結層→同一區網怎麼接。其中保證可靠傳輸的是 </text:span><text:span text:style-name="T3">（　　　　　</text:span><text:span text:style-name="T4">1</text:span><text:span text:style-name="T3">　）</text:span><text:span text:style-name="T10">，高速但不保證的是 </text:span><text:span text:style-name="T3">（　　　　　</text:span><text:span text:style-name="T4">2</text:span><text:span text:style-name="T3">　）</text:span><text:span text:style-name="T10">。</text:span></text:p>
            <text:p text:style-name="P12"><text:span text:style-name="T10">OSI 是理論模型共 </text:span><text:span text:style-name="T3">（　　　　　</text:span><text:span text:style-name="T4">3</text:span><text:span text:style-name="T3">　）</text:span><text:span text:style-name="T10"> 層；TCP/IP 是實際模型共 </text:span><text:span text:style-name="T3">（　　　　　</text:span><text:span text:style-name="T4">4</text:span><text:span text:style-name="T3">　）</text:span><text:span text:style-name="T10"> 層，差別在 TCP/IP 把 </text:span><text:span text:style-name="T3">（　　　　　</text:span><text:span text:style-name="T4">5</text:span><text:span text:style-name="T3">　）</text:span><text:span text:style-name="T10"> 層與 </text:span><text:span text:style-name="T3">（　　　　　</text:span><text:span text:style-name="T4">6</text:span><text:span text:style-name="T3">　）</text:span><text:span text:style-name="T10"> 層併入 Application。</text:span></text:p>
            <text:p text:style-name="P12"><text:span text:style-name="T10">網路層三大工作：</text:span><text:span text:style-name="T3">（　　　　　</text:span><text:span text:style-name="T4">7</text:span><text:span text:style-name="T3">　）</text:span><text:span text:style-name="T10"> 負責定位、</text:span><text:span text:style-name="T3">（　　　　　</text:span><text:span text:style-name="T4">8</text:span><text:span text:style-name="T3">　）</text:span><text:span text:style-name="T10"> 負責選路、</text:span><text:span text:style-name="T3">（　　　　　</text:span><text:span text:style-name="T4">9</text:span><text:span text:style-name="T3">　）</text:span><text:span text:style-name="T10"> 負責錯誤回報。ping 指令完全使用 </text:span><text:span text:style-name="T3">（　　　　　</text:span><text:span text:style-name="T4">10</text:span><text:span text:style-name="T3">　）</text:span><text:span text:style-name="T10"> 協定，不走 TCP 也不走 UDP。</text:span></text:p>
            <text:p text:style-name="P12"><text:span text:style-name="T10">ARP 的作用是用 IP 找 </text:span><text:span text:style-name="T3">（　　　　　</text:span><text:span text:style-name="T4">11</text:span><text:span text:style-name="T3">　）</text:span><text:span text:style-name="T10">，只在同一個 </text:span><text:span text:style-name="T3">（　　　　　</text:span><text:span text:style-name="T4">12</text:span><text:span text:style-name="T3">　）</text:span><text:span text:style-name="T10"> 內使用。</text:span></text:p>
            <text:p text:style-name="P12"><text:span text:style-name="T10">Traceroute 的原理是 </text:span><text:span text:style-name="T3">（　　　　　</text:span><text:span text:style-name="T4">13</text:span><text:span text:style-name="T3">　）</text:span><text:span text:style-name="T10"> 遞增 ＋ </text:span><text:span text:style-name="T3">（　　　　　</text:span><text:span text:style-name="T4">14</text:span><text:span text:style-name="T3">　）</text:span><text:span text:style-name="T10"> 回報，逐步炸出完整路徑；TTL 每經過一個路由器就減 </text:span><text:span text:style-name="T3">（　　　　　</text:span><text:span text:style-name="T4">15</text:span><text:span text:style-name="T3">　）</text:span><text:span text:style-name="T10">，歸零時回傳 ICMP </text:span><text:span text:style-name="T3">（　　　　　</text:span><text:span text:style-name="T4">16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二 篇　IP 位址與封包處理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"><text:span text:style-name="T9">📐 <text:s/></text:span><text:span text:style-name="T13">公式與數值填空</text:span></text:p>
            <text:p text:style-name="P11"><text:span text:style-name="T10">VLSM 黃金公式：需求 </text:span><text:span text:style-name="T3">（　　　　　</text:span><text:span text:style-name="T4">1</text:span><text:span text:style-name="T3">　）</text:span><text:span text:style-name="T10"> → 找最小 </text:span><text:span text:style-name="T3">（　　　　　</text:span><text:span text:style-name="T4">2</text:span><text:span text:style-name="T3">　）</text:span><text:span text:style-name="T10"> → 前綴 ＝ </text:span><text:span text:style-name="T3">（　　　　　</text:span><text:span text:style-name="T4">3</text:span><text:span text:style-name="T3">　）</text:span><text:span text:style-name="T10">。可用主機數 ＝ 2^(主機 bit) </text:span><text:span text:style-name="T3">（　　　　　</text:span><text:span text:style-name="T4">4</text:span><text:span text:style-name="T3">　）</text:span><text:span text:style-name="T10">，扣掉的是網路位址與 </text:span><text:span text:style-name="T3">（　　　　　</text:span><text:span text:style-name="T4">5</text:span><text:span text:style-name="T3">　）</text:span><text:span text:style-name="T10">。</text:span></text:p>
            <text:p text:style-name="P12"><text:span text:style-name="T10">前綴速查：/26 可用 </text:span><text:span text:style-name="T3">（　　　　　</text:span><text:span text:style-name="T4">6</text:span><text:span text:style-name="T3">　）</text:span><text:span text:style-name="T10"> 台、/27 可用 </text:span><text:span text:style-name="T3">（　　　　　</text:span><text:span text:style-name="T4">7</text:span><text:span text:style-name="T3">　）</text:span><text:span text:style-name="T10"> 台、/28 可用 </text:span><text:span text:style-name="T3">（　　　　　</text:span><text:span text:style-name="T4">8</text:span><text:span text:style-name="T3">　）</text:span><text:span text:style-name="T10"> 台、/30 可用 </text:span><text:span text:style-name="T3">（　　　　　</text:span><text:span text:style-name="T4">9</text:span><text:span text:style-name="T3">　）</text:span><text:span text:style-name="T10"> 台。特例 </text:span><text:span text:style-name="T3">（　　　　　</text:span><text:span text:style-name="T4">10</text:span><text:span text:style-name="T3">　）</text:span><text:span text:style-name="T10">（RFC 3021）2 個 IP 全部可用。</text:span></text:p>
            <text:p text:style-name="P12"><text:span text:style-name="T10">CIDR 合併三條件：① </text:span><text:span text:style-name="T3">（　　　　　</text:span><text:span text:style-name="T4">11</text:span><text:span text:style-name="T3">　）</text:span><text:span text:style-name="T10"> ② 數量是 </text:span><text:span text:style-name="T3">（　　　　　</text:span><text:span text:style-name="T4">12</text:span><text:span text:style-name="T3">　）</text:span><text:span text:style-name="T10"> ③ 起始位址 </text:span><text:span text:style-name="T3">（　　　　　</text:span><text:span text:style-name="T4">13</text:span><text:span text:style-name="T3">　）</text:span><text:span text:style-name="T10">；合併 2ⁿ 個子網則前綴 </text:span><text:span text:style-name="T3">（　　　　　</text:span><text:span text:style-name="T4">14</text:span><text:span text:style-name="T3">　）</text:span><text:span text:style-name="T10">。</text:span></text:p>
            <text:p text:style-name="P12"><text:span text:style-name="T10">封包 &gt; MTU 就要切，叫 </text:span><text:span text:style-name="T3">（　　　　　</text:span><text:span text:style-name="T4">15</text:span><text:span text:style-name="T3">　）</text:span><text:span text:style-name="T10">；Ethernet 的 MTU ＝ </text:span><text:span text:style-name="T3">（　　　　　</text:span><text:span text:style-name="T4">16</text:span><text:span text:style-name="T3">　）</text:span><text:span text:style-name="T10"> bytes。IPv4 由 Router 或 Source 切，IPv6 只能由 </text:span><text:span text:style-name="T3">（　　　　　</text:span><text:span text:style-name="T4">17</text:span><text:span text:style-name="T3">　）</text:span><text:span text:style-name="T10"> 切。</text:span></text:p>
            <text:p text:style-name="P12"><text:span text:style-name="T10">Fragment Offset ＝ 起始位置 ÷ </text:span><text:span text:style-name="T3">（　　　　　</text:span><text:span text:style-name="T4">18</text:span><text:span text:style-name="T3">　）</text:span><text:span text:style-name="T10">。Protocol 值：ICMP=</text:span><text:span text:style-name="T3">（　　　　　</text:span><text:span text:style-name="T4">19</text:span><text:span text:style-name="T3">　）</text:span><text:span text:style-name="T10">、TCP=</text:span><text:span text:style-name="T3">（　　　　　</text:span><text:span text:style-name="T4">20</text:span><text:span text:style-name="T3">　）</text:span><text:span text:style-name="T10">、UDP=</text:span><text:span text:style-name="T3">（　　　　　</text:span><text:span text:style-name="T4">21</text:span><text:span text:style-name="T3">　）</text:span><text:span text:style-name="T10">。</text:span></text:p>
            <text:p text:style-name="P12"><text:span text:style-name="T10">DF=1 代表 </text:span><text:span text:style-name="T3">（　　　　　</text:span><text:span text:style-name="T4">22</text:span><text:span text:style-name="T3">　）</text:span><text:span text:style-name="T10">（太大就丟並回 ICMP）；MF=1 代表 </text:span><text:span text:style-name="T3">（　　　　　</text:span><text:span text:style-name="T4">23</text:span><text:span text:style-name="T3">　）</text:span><text:span text:style-name="T10">。TCP 的 MSS ＝ MTU − 20 − 20 ＝ </text:span><text:span text:style-name="T3">（　　　　　</text:span><text:span text:style-name="T4">24</text:span><text:span text:style-name="T3">　）</text:span><text:span text:style-name="T10"> bytes。</text:span></text:p>
            <text:p text:style-name="P12"><text:span text:style-name="T10">127.0.0.1 是 </text:span><text:span text:style-name="T3">（　　　　　</text:span><text:span text:style-name="T4">25</text:span><text:span text:style-name="T3">　）</text:span><text:span text:style-name="T10">，所以 A 類跳過 127；找出整條路徑最小 MTU 的機制叫 </text:span><text:span text:style-name="T3">（　　　　　</text:span><text:span text:style-name="T4">26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三 篇　IPv4 → IPv6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><text:span text:style-name="T9">🔄 <text:s/></text:span><text:span text:style-name="T13">對照填空</text:span></text:p>
            <text:p text:style-name="P11"><text:span text:style-name="T10">IPv4 位址長度 </text:span><text:span text:style-name="T3">（　　　　　</text:span><text:span text:style-name="T4">1</text:span><text:span text:style-name="T3">　）</text:span><text:span text:style-name="T10"> bit；IPv6 位址長度 </text:span><text:span text:style-name="T3">（　　　　　</text:span><text:span text:style-name="T4">2</text:span><text:span text:style-name="T3">　）</text:span><text:span text:style-name="T10"> bit。IPv6 的 Header 為固定 </text:span><text:span text:style-name="T3">（　　　　　</text:span><text:span text:style-name="T4">3</text:span><text:span text:style-name="T3">　）</text:span><text:span text:style-name="T10"> bytes。</text:span></text:p>
            <text:p text:style-name="P12"><text:span text:style-name="T10">IPv6 五大特點口訣：大（128 bit）＋ 安全（</text:span><text:span text:style-name="T3">（　　　　　</text:span><text:span text:style-name="T4">4</text:span><text:span text:style-name="T3">　）</text:span><text:span text:style-name="T10">）＋ 快（固定 Header）＋ 自動（</text:span><text:span text:style-name="T3">（　　　　　</text:span><text:span text:style-name="T4">5</text:span><text:span text:style-name="T3">　）</text:span><text:span text:style-name="T10">）＋ 乾淨（無 </text:span><text:span text:style-name="T3">（　　　　　</text:span><text:span text:style-name="T4">6</text:span><text:span text:style-name="T3">　）</text:span><text:span text:style-name="T10">）。</text:span></text:p>
            <text:p text:style-name="P12"><text:span text:style-name="T10">三種過渡技術：最常用、效能最好的是 </text:span><text:span text:style-name="T3">（　　　　　</text:span><text:span text:style-name="T4">7</text:span><text:span text:style-name="T3">　）</text:span><text:span text:style-name="T10">（DNS 回 A record→IPv4、</text:span><text:span text:style-name="T3">（　　　　　</text:span><text:span text:style-name="T4">8</text:span><text:span text:style-name="T3">　）</text:span><text:span text:style-name="T10"> record→IPv6）；把 IPv6 封裝進 IPv4 的是 </text:span><text:span text:style-name="T3">（　　　　　</text:span><text:span text:style-name="T4">9</text:span><text:span text:style-name="T3">　）</text:span><text:span text:style-name="T10">（如 6in4、Teredo）；協定即時互轉的是 </text:span><text:span text:style-name="T3">（　　　　　</text:span><text:span text:style-name="T4">10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四 篇　ARP、NAT 與完整上網流程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><text:span text:style-name="T9">🌐 <text:s/></text:span><text:span text:style-name="T13">流程與觀念填空</text:span></text:p>
            <text:p text:style-name="P11"><text:span text:style-name="T10">完整上網流程順序：DNS → </text:span><text:span text:style-name="T3">（　　　　　</text:span><text:span text:style-name="T4">1</text:span><text:span text:style-name="T3">　）</text:span><text:span text:style-name="T10"> → L2 封包 → </text:span><text:span text:style-name="T3">（　　　　　</text:span><text:span text:style-name="T4">2</text:span><text:span text:style-name="T3">　）</text:span><text:span text:style-name="T10">（去程）→ Internet → NAT（回程）→ 你。</text:span></text:p>
            <text:p text:style-name="P12"><text:span text:style-name="T10">核心觀念：</text:span><text:span text:style-name="T3">（　　　　　</text:span><text:span text:style-name="T4">3</text:span><text:span text:style-name="T3">　）</text:span><text:span text:style-name="T10"> ＝ 最終目的地（全程不變）；</text:span><text:span text:style-name="T3">（　　　　　</text:span><text:span text:style-name="T4">4</text:span><text:span text:style-name="T3">　）</text:span><text:span text:style-name="T10"> ＝ 下一站（每跳更換）。</text:span></text:p>
            <text:p text:style-name="P12"><text:span text:style-name="T10">最大地雷：在內網時，ARP 找的是 </text:span><text:span text:style-name="T3">（　　　　　</text:span><text:span text:style-name="T4">5</text:span><text:span text:style-name="T3">　）</text:span><text:span text:style-name="T10"> 的 MAC，不是 Google 的 MAC。</text:span></text:p>
            <text:p text:style-name="P12"><text:span text:style-name="T10">NAT 三類型中，多台共用一個公網 IP、靠 </text:span><text:span text:style-name="T3">（　　　　　</text:span><text:span text:style-name="T4">6</text:span><text:span text:style-name="T3">　）</text:span><text:span text:style-name="T10"> 區分的是 </text:span><text:span text:style-name="T3">（　　　　　</text:span><text:span text:style-name="T4">7</text:span><text:span text:style-name="T3">　）</text:span><text:span text:style-name="T10">。NAT 最大的缺點是破壞 </text:span><text:span text:style-name="T3">（　　　　　</text:span><text:span text:style-name="T4">8</text:span><text:span text:style-name="T3">　）</text:span><text:span text:style-name="T10"> 連線。</text:span></text:p>
            <text:p text:style-name="P12"><text:span text:style-name="T10">ARP 的攻擊手法叫 </text:span><text:span text:style-name="T3">（　　　　　</text:span><text:span text:style-name="T4">9</text:span><text:span text:style-name="T3">　）</text:span><text:span text:style-name="T10">，會造成 </text:span><text:span text:style-name="T3">（　　　　　</text:span><text:span text:style-name="T4">10</text:span><text:span text:style-name="T3">　）</text:span><text:span text:style-name="T10">。解決 NAT 限制的三方法：Port Forwarding、</text:span><text:span text:style-name="T3">（　　　　　</text:span><text:span text:style-name="T4">11</text:span><text:span text:style-name="T3">　）</text:span><text:span text:style-name="T10">、</text:span><text:span text:style-name="T3">（　　　　　</text:span><text:span text:style-name="T4">12</text:span><text:span text:style-name="T3">　）</text:span><text:span text:style-name="T10">；若兩端皆為 Symmetric NAT 則需改用 </text:span><text:span text:style-name="T3">（　　　　　</text:span><text:span text:style-name="T4">13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五 篇　TCP 傳輸控制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><text:span text:style-name="T9">🚦 <text:s/></text:span><text:span text:style-name="T13">握手與擁塞控制填空</text:span></text:p>
            <text:p text:style-name="P11"><text:span text:style-name="T10">三次握手順序：</text:span><text:span text:style-name="T3">（　　　　　</text:span><text:span text:style-name="T4">1</text:span><text:span text:style-name="T3">　）</text:span><text:span text:style-name="T10"> → </text:span><text:span text:style-name="T3">（　　　　　</text:span><text:span text:style-name="T4">2</text:span><text:span text:style-name="T3">　）</text:span><text:span text:style-name="T10"> → </text:span><text:span text:style-name="T3">（　　　　　</text:span><text:span text:style-name="T4">3</text:span><text:span text:style-name="T3">　）</text:span><text:span text:style-name="T10">，目的是確認 </text:span><text:span text:style-name="T3">（　　　　　</text:span><text:span text:style-name="T4">4</text:span><text:span text:style-name="T3">　）</text:span><text:span text:style-name="T10"> 並避免舊封包誤觸發新連線。</text:span></text:p>
            <text:p text:style-name="P12"><text:span text:style-name="T10">大量發送 SYN 卻不回 ACK、用半連線耗盡伺服器資源的攻擊叫 </text:span><text:span text:style-name="T3">（　　　　　</text:span><text:span text:style-name="T4">5</text:span><text:span text:style-name="T3">　）</text:span><text:span text:style-name="T10">，本質是 </text:span><text:span text:style-name="T3">（　　　　　</text:span><text:span text:style-name="T4">6</text:span><text:span text:style-name="T3">　）</text:span><text:span text:style-name="T10"> 攻擊。</text:span></text:p>
            <text:p text:style-name="P12"><text:span text:style-name="T10">實際傳送量 ＝ </text:span><text:span text:style-name="T3">（　　　　　</text:span><text:span text:style-name="T4">7</text:span><text:span text:style-name="T3">　）</text:span><text:span text:style-name="T10">；其中 rwnd 是 </text:span><text:span text:style-name="T3">（　　　　　</text:span><text:span text:style-name="T4">8</text:span><text:span text:style-name="T3">　）</text:span><text:span text:style-name="T10"> 限制、cwnd 是 </text:span><text:span text:style-name="T3">（　　　　　</text:span><text:span text:style-name="T4">9</text:span><text:span text:style-name="T3">　）</text:span><text:span text:style-name="T10"> 限制。</text:span></text:p>
            <text:p text:style-name="P12"><text:span text:style-name="T10">擁塞控制三階段：先 Slow Start 為 </text:span><text:span text:style-name="T3">（　　　　　</text:span><text:span text:style-name="T4">10</text:span><text:span text:style-name="T3">　）</text:span><text:span text:style-name="T10"> 成長（每個 ACK +1），到 ssthresh 後改 Congestion Avoidance 為 </text:span><text:span text:style-name="T3">（　　　　　</text:span><text:span text:style-name="T4">11</text:span><text:span text:style-name="T3">　）</text:span><text:span text:style-name="T10"> 成長（每 RTT +1）。</text:span></text:p>
            <text:p text:style-name="P12"><text:span text:style-name="T10">丟包處理：Timeout → cwnd 重設為 </text:span><text:span text:style-name="T3">（　　　　　</text:span><text:span text:style-name="T4">12</text:span><text:span text:style-name="T3">　）</text:span><text:span text:style-name="T10"> 回 Slow Start；收到 3 個重複 ACK → cwnd </text:span><text:span text:style-name="T3">（　　　　　</text:span><text:span text:style-name="T4">13</text:span><text:span text:style-name="T3">　）</text:span><text:span text:style-name="T10"> 續 CA。兩者的 ssthresh 都變成 </text:span><text:span text:style-name="T3">（　　　　　</text:span><text:span text:style-name="T4">14</text:span><text:span text:style-name="T3">　）</text:span><text:span text:style-name="T10">。</text:span></text:p>
            <text:p text:style-name="P12"><text:span text:style-name="T10">TCP 加速/降速的策略簡稱 </text:span><text:span text:style-name="T3">（　　　　　</text:span><text:span text:style-name="T4">15</text:span><text:span text:style-name="T3">　）</text:span><text:span text:style-name="T10">：沒丟包每 RTT +1，丟包則 ×</text:span><text:span text:style-name="T3">（　　　　　</text:span><text:span text:style-name="T4">16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六 篇　DNS 與 DNSSEC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<text:span text:style-name="T9">📚 <text:s/></text:span><text:span text:style-name="T13">查詢流程與安全填空</text:span></text:p>
            <text:p text:style-name="P11"><text:span text:style-name="T10">DNS 查詢流程：</text:span><text:span text:style-name="T3">（　　　　　</text:span><text:span text:style-name="T4">1</text:span><text:span text:style-name="T3">　）</text:span><text:span text:style-name="T10"> → Local → </text:span><text:span text:style-name="T3">（　　　　　</text:span><text:span text:style-name="T4">2</text:span><text:span text:style-name="T3">　）</text:span><text:span text:style-name="T10"> → </text:span><text:span text:style-name="T3">（　　　　　</text:span><text:span text:style-name="T4">3</text:span><text:span text:style-name="T3">　）</text:span><text:span text:style-name="T10"> → </text:span><text:span text:style-name="T3">（　　　　　</text:span><text:span text:style-name="T4">4</text:span><text:span text:style-name="T3">　）</text:span><text:span text:style-name="T10"> → 取得 IP。</text:span></text:p>
            <text:p text:style-name="P12"><text:span text:style-name="T10">DNS 幫你問到底叫 </text:span><text:span text:style-name="T3">（　　　　　</text:span><text:span text:style-name="T4">5</text:span><text:span text:style-name="T3">　）</text:span><text:span text:style-name="T10">，口訣「代查到底」；你自己逐層問叫 </text:span><text:span text:style-name="T3">（　　　　　</text:span><text:span text:style-name="T4">6</text:span><text:span text:style-name="T3">　）</text:span><text:span text:style-name="T10">，口訣「逐層詢問」。</text:span></text:p>
            <text:p text:style-name="P12"><text:span text:style-name="T10">四種資源紀錄：A→IPv4、NS→名稱伺服器、</text:span><text:span text:style-name="T3">（　　　　　</text:span><text:span text:style-name="T4">7</text:span><text:span text:style-name="T3">　）</text:span><text:span text:style-name="T10">→郵件伺服器、</text:span><text:span text:style-name="T3">（　　　　　</text:span><text:span text:style-name="T4">8</text:span><text:span text:style-name="T3">　）</text:span><text:span text:style-name="T10">→網域別名。</text:span></text:p>
            <text:p text:style-name="P12"><text:span text:style-name="T10">Open Resolver 的兩大風險：</text:span><text:span text:style-name="T3">（　　　　　</text:span><text:span text:style-name="T4">9</text:span><text:span text:style-name="T3">　）</text:span><text:span text:style-name="T10"> 與 </text:span><text:span text:style-name="T3">（　　　　　</text:span><text:span text:style-name="T4">10</text:span><text:span text:style-name="T3">　）</text:span><text:span text:style-name="T10">。</text:span></text:p>
            <text:p text:style-name="P12"><text:span text:style-name="T10">一句話記 DNSSEC：</text:span><text:span text:style-name="T3">（　　　　　</text:span><text:span text:style-name="T4">11</text:span><text:span text:style-name="T3">　）</text:span><text:span text:style-name="T10">，不是加密、不防 </text:span><text:span text:style-name="T3">（　　　　　</text:span><text:span text:style-name="T4">12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七 篇　路由協定 OSPF / BGP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><text:span text:style-name="T9">🗺️ <text:s/></text:span><text:span text:style-name="T13">路由觀念填空</text:span></text:p>
            <text:p text:style-name="P11"><text:span text:style-name="T10">組織內部用 </text:span><text:span text:style-name="T3">（　　　　　</text:span><text:span text:style-name="T4">1</text:span><text:span text:style-name="T3">　）</text:span><text:span text:style-name="T10">（如 OSPF、RIP）；不同組織之間用 </text:span><text:span text:style-name="T3">（　　　　　</text:span><text:span text:style-name="T4">2</text:span><text:span text:style-name="T3">　）</text:span><text:span text:style-name="T10">（即 BGP）。</text:span></text:p>
            <text:p text:style-name="P12"><text:span text:style-name="T10">OSPF 規定所有 Area 必須連到 </text:span><text:span text:style-name="T3">（　　　　　</text:span><text:span text:style-name="T4">3</text:span><text:span text:style-name="T3">　）</text:span><text:span text:style-name="T10">（骨幹）才能互通。四種 Router：只在區內的 Internal、在 Area 0 的 Backbone、跨 Area 橋樑的 </text:span><text:span text:style-name="T3">（　　　　　</text:span><text:span text:style-name="T4">4</text:span><text:span text:style-name="T3">　）</text:span><text:span text:style-name="T10">、跨 AS 入口的 </text:span><text:span text:style-name="T3">（　　　　　</text:span><text:span text:style-name="T4">5</text:span><text:span text:style-name="T3">　）</text:span><text:span text:style-name="T10">。</text:span></text:p>
            <text:p text:style-name="P12"><text:span text:style-name="T10">BGP 選路前三順序：Weight（Cisco 私有）&gt; </text:span><text:span text:style-name="T3">（　　　　　</text:span><text:span text:style-name="T4">6</text:span><text:span text:style-name="T3">　）</text:span><text:span text:style-name="T10"> &gt; 本地產生 &gt; </text:span><text:span text:style-name="T3">（　　　　　</text:span><text:span text:style-name="T4">7</text:span><text:span text:style-name="T3">　）</text:span><text:span text:style-name="T10"> …最後決勝點是 </text:span><text:span text:style-name="T3">（　　　　　</text:span><text:span text:style-name="T4">8</text:span><text:span text:style-name="T3">　）</text:span><text:span text:style-name="T10">。</text:span></text:p>
            <text:p text:style-name="P12"><text:span text:style-name="T10">BGP 本質是 </text:span><text:span text:style-name="T3">（　　　　　</text:span><text:span text:style-name="T4">9</text:span><text:span text:style-name="T3">　）</text:span><text:span text:style-name="T10"> 導向（不是距離導向），最重要的「通用」屬性是 </text:span><text:span text:style-name="T3">（　　　　　</text:span><text:span text:style-name="T4">10</text:span><text:span text:style-name="T3">　）</text:span><text:span text:style-name="T10">。</text:span></text:p>
            <text:p text:style-name="P12"><text:span text:style-name="T10">三層分工口訣：防火牆決定 </text:span><text:span text:style-name="T3">（　　　　　</text:span><text:span text:style-name="T4">11</text:span><text:span text:style-name="T3">　）</text:span><text:span text:style-name="T10">、NAT 解決 </text:span><text:span text:style-name="T3">（　　　　　</text:span><text:span text:style-name="T4">12</text:span><text:span text:style-name="T3">　）</text:span><text:span text:style-name="T10">、BGP 決定 </text:span><text:span text:style-name="T3">（　　　　　</text:span><text:span text:style-name="T4">13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八 篇　網路系統進階 SDN / LB / CDN / 5G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><text:span text:style-name="T9">🌐 <text:s/></text:span><text:span text:style-name="T13">進階主題填空</text:span></text:p>
            <text:p text:style-name="P11"><text:span text:style-name="T10">SDN 最核心的設計是把 </text:span><text:span text:style-name="T3">（　　　　　</text:span><text:span text:style-name="T4">1</text:span><text:span text:style-name="T3">　）</text:span><text:span text:style-name="T10"> 與 </text:span><text:span text:style-name="T3">（　　　　　</text:span><text:span text:style-name="T4">2</text:span><text:span text:style-name="T3">　）</text:span><text:span text:style-name="T10"> 分離；三層架構為 Application → </text:span><text:span text:style-name="T3">（　　　　　</text:span><text:span text:style-name="T4">3</text:span><text:span text:style-name="T3">　）</text:span><text:span text:style-name="T10"> → Infrastructure。</text:span></text:p>
            <text:p text:style-name="P12"><text:span text:style-name="T10">負載平衡三策略口訣「輪、重、黏」：輪＝</text:span><text:span text:style-name="T3">（　　　　　</text:span><text:span text:style-name="T4">4</text:span><text:span text:style-name="T3">　）</text:span><text:span text:style-name="T10">、重＝</text:span><text:span text:style-name="T3">（　　　　　</text:span><text:span text:style-name="T4">5</text:span><text:span text:style-name="T3">　）</text:span><text:span text:style-name="T10">、黏＝</text:span><text:span text:style-name="T3">（　　　　　</text:span><text:span text:style-name="T4">6</text:span><text:span text:style-name="T3">　）</text:span><text:span text:style-name="T10">。</text:span></text:p>
            <text:p text:style-name="P12"><text:span text:style-name="T10">CDN 流程靠 DNS 的 </text:span><text:span text:style-name="T3">（　　　　　</text:span><text:span text:style-name="T4">7</text:span><text:span text:style-name="T3">　）</text:span><text:span text:style-name="T10"> 記錄（網址→網址，非 IP）導向最近的 </text:span><text:span text:style-name="T3">（　　　　　</text:span><text:span text:style-name="T4">8</text:span><text:span text:style-name="T3">　）</text:span><text:span text:style-name="T10"> 伺服器。</text:span></text:p>
            <text:p text:style-name="P12"><text:span text:style-name="T10">5G 四大特性口訣「快、低、多、切」：快＝</text:span><text:span text:style-name="T3">（　　　　　</text:span><text:span text:style-name="T4">9</text:span><text:span text:style-name="T3">　）</text:span><text:span text:style-name="T10">、低＝</text:span><text:span text:style-name="T3">（　　　　　</text:span><text:span text:style-name="T4">10</text:span><text:span text:style-name="T3">　）</text:span><text:span text:style-name="T10">、多＝</text:span><text:span text:style-name="T3">（　　　　　</text:span><text:span text:style-name="T4">11</text:span><text:span text:style-name="T3">　）</text:span><text:span text:style-name="T10">、切＝</text:span><text:span text:style-name="T3">（　　　　　</text:span><text:span text:style-name="T4">12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九 篇　無線通訊 WiFi vs Bluetooth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><text:span text:style-name="T9">📶 <text:s/></text:span><text:span text:style-name="T13">無線機制填空</text:span></text:p>
            <text:p text:style-name="P11"><text:span text:style-name="T10">WiFi 用 </text:span><text:span text:style-name="T3">（　　　　　</text:span><text:span text:style-name="T4">1</text:span><text:span text:style-name="T3">　）</text:span><text:span text:style-name="T10"> 來「避免」碰撞；有線乙太網路則用 </text:span><text:span text:style-name="T3">（　　　　　</text:span><text:span text:style-name="T4">2</text:span><text:span text:style-name="T3">　）</text:span><text:span text:style-name="T10"> 來「偵測」碰撞。WiFi 高速傳輸的基礎技術是 </text:span><text:span text:style-name="T3">（　　　　　</text:span><text:span text:style-name="T4">3</text:span><text:span text:style-name="T3">　）</text:span><text:span text:style-name="T10">。</text:span></text:p>
            <text:p text:style-name="P12"><text:span text:style-name="T10">Bluetooth 不靠搶，而由 </text:span><text:span text:style-name="T3">（　　　　　</text:span><text:span text:style-name="T4">4</text:span><text:span text:style-name="T3">　）</text:span><text:span text:style-name="T10"> 統一排班，Slave 照順序；其抗干擾的跳頻技術叫 </text:span><text:span text:style-name="T3">（　　　　　</text:span><text:span text:style-name="T4">5</text:span><text:span text:style-name="T3">　）</text:span><text:span text:style-name="T10">。</text:span></text:p>
            <text:p text:style-name="P12"><text:span text:style-name="T10">WiFi 的 QoS 機制是 </text:span><text:span text:style-name="T3">（　　　　　</text:span><text:span text:style-name="T4">6</text:span><text:span text:style-name="T3">　）</text:span><text:span text:style-name="T10">（急診室分級）；藍牙的即時語音用 </text:span><text:span text:style-name="T3">（　　　　　</text:span><text:span text:style-name="T4">7</text:span><text:span text:style-name="T3">　）</text:span><text:span text:style-name="T10"> 或加強版 </text:span><text:span text:style-name="T3">（　　　　　</text:span><text:span text:style-name="T4">8</text:span><text:span text:style-name="T3">　）</text:span><text:span text:style-name="T10">。</text:span></text:p>
            <text:p text:style-name="P12"><text:span text:style-name="T10">把時間切成固定小格子、各裝置依序使用的機制叫 </text:span><text:span text:style-name="T3">（　　　　　</text:span><text:span text:style-name="T4">9</text:span><text:span text:style-name="T3">　）</text:span><text:span text:style-name="T10">。藍牙的資料管理員 </text:span><text:span text:style-name="T3">（　　　　　</text:span><text:span text:style-name="T4">10</text:span><text:span text:style-name="T3">　）</text:span><text:span text:style-name="T10"> 主要位於 OSI 的 </text:span><text:span text:style-name="T3">（　　　　　</text:span><text:span text:style-name="T4">11</text:span><text:span text:style-name="T3">　）</text:span><text:span text:style-name="T10">，其中負責控制管理的通道是 </text:span><text:span text:style-name="T3">（　　　　　</text:span><text:span text:style-name="T4">12</text:span><text:span text:style-name="T3">　）</text:span><text:span text:style-name="T10">。</text:span></text:p>
          </table:table-cell>
        </table:table-row>
      </table:table>
      <text:h text:style-name="P1" text:outline-level="1"><text:span text:style-name="T12">第 十 篇　資訊安全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><text:span text:style-name="T9">🛡️ <text:s/></text:span><text:span text:style-name="T13">甲、設備與攻防填空</text:span></text:p>
            <text:p text:style-name="P11"><text:span text:style-name="T10">設備萬用口訣：FW 封外（只看 IP/Port，屬 </text:span><text:span text:style-name="T3">（　　　　　</text:span><text:span text:style-name="T4">1</text:span><text:span text:style-name="T3">　）</text:span><text:span text:style-name="T10">）、WAF 看內（防 SQLi/XSS，屬 </text:span><text:span text:style-name="T3">（　　　　　</text:span><text:span text:style-name="T4">2</text:span><text:span text:style-name="T3">　）</text:span><text:span text:style-name="T10">）、NGFW 最強（有 </text:span><text:span text:style-name="T3">（　　　　　</text:span><text:span text:style-name="T4">3</text:span><text:span text:style-name="T3">　）</text:span><text:span text:style-name="T10"> 深度檢查）。</text:span></text:p>
            <text:p text:style-name="P12"><text:span text:style-name="T10">把對外服務（Web/Mail/DNS）隔離、就算被駭也不傷內部的區域叫 </text:span><text:span text:style-name="T3">（　　　　　</text:span><text:span text:style-name="T4">4</text:span><text:span text:style-name="T3">　）</text:span><text:span text:style-name="T10">。</text:span></text:p>
            <text:p text:style-name="P12"><text:span text:style-name="T10">IOC 四線索口訣「網、檔、連、控」：網＝</text:span><text:span text:style-name="T3">（　　　　　</text:span><text:span text:style-name="T4">5</text:span><text:span text:style-name="T3">　）</text:span><text:span text:style-name="T10">、檔＝</text:span><text:span text:style-name="T3">（　　　　　</text:span><text:span text:style-name="T4">6</text:span><text:span text:style-name="T3">　）</text:span><text:span text:style-name="T10">、連＝惡意 IP、控＝</text:span><text:span text:style-name="T3">（　　　　　</text:span><text:span text:style-name="T4">7</text:span><text:span text:style-name="T3">　）</text:span><text:span text:style-name="T10">；IOC 是攻擊的「</text:span><text:span text:style-name="T3">（　　　　　</text:span><text:span text:style-name="T4">8</text:span><text:span text:style-name="T3">　）</text:span><text:span text:style-name="T10">」，不能用來預測攻擊。</text:span></text:p>
            <text:p text:style-name="P12"><text:span text:style-name="T10">幫使用者隱藏 IP 的是 </text:span><text:span text:style-name="T3">（　　　　　</text:span><text:span text:style-name="T4">9</text:span><text:span text:style-name="T3">　）</text:span><text:span text:style-name="T10">；幫伺服器負載平衡、隱藏後端的是 </text:span><text:span text:style-name="T3">（　　　　　</text:span><text:span text:style-name="T4">10</text:span><text:span text:style-name="T3">　）</text:span><text:span text:style-name="T10">。</text:span></text:p>
            <text:p text:style-name="P12"><text:span text:style-name="T10">SQL Injection 的經典攻擊字串是 </text:span><text:span text:style-name="T3">（　　　　　</text:span><text:span text:style-name="T4">11</text:span><text:span text:style-name="T3">　）</text:span><text:span text:style-name="T10">；根本防禦手段是 </text:span><text:span text:style-name="T3">（　　　　　</text:span><text:span text:style-name="T4">12</text:span><text:span text:style-name="T3">　）</text:span><text:span text:style-name="T10">。</text:span></text:p>
            <text:p text:style-name="P12"><text:span text:style-name="T10">廠商只有 0 天可應對、傳統防毒因無特徵碼而失效的攻擊叫 </text:span><text:span text:style-name="T3">（　　　　　</text:span><text:span text:style-name="T4">13</text:span><text:span text:style-name="T3">　）</text:span><text:span text:style-name="T10">；其最怕的就是沒有 </text:span><text:span text:style-name="T3">（　　　　　</text:span><text:span text:style-name="T4">14</text:span><text:span text:style-name="T3">　）</text:span><text:span text:style-name="T10">。</text:span></text:p>
          </table:table-cell>
        </table:table-row>
        <table:table-row table:style-name="表格11.1">
          <table:table-cell table:style-name="表格11.A2" office:value-type="string">
            <text:p text:style-name="P8"><text:span text:style-name="T9">🏢 <text:s/></text:span><text:span text:style-name="T15">乙、偵測與企業資安填空</text:span></text:p>
            <text:p text:style-name="P11"><text:span text:style-name="T10">三防分工：Firewall 擋入口、IDS 只 </text:span><text:span text:style-name="T3">（　　　　　</text:span><text:span text:style-name="T4">1</text:span><text:span text:style-name="T3">　）</text:span><text:span text:style-name="T10">、IPS 偵測 ＋ </text:span><text:span text:style-name="T3">（　　　　　</text:span><text:span text:style-name="T4">2</text:span><text:span text:style-name="T3">　）</text:span><text:span text:style-name="T10">。HIDS 看主機（</text:span><text:span text:style-name="T3">（　　　　　</text:span><text:span text:style-name="T4">3</text:span><text:span text:style-name="T3">　）</text:span><text:span text:style-name="T10">）、NIDS 看網路（</text:span><text:span text:style-name="T3">（　　　　　</text:span><text:span text:style-name="T4">4</text:span><text:span text:style-name="T3">　）</text:span><text:span text:style-name="T10">）。</text:span></text:p>
            <text:p text:style-name="P12"><text:span text:style-name="T10">易混兩協定：</text:span><text:span text:style-name="T3">（　　　　　</text:span><text:span text:style-name="T4">5</text:span><text:span text:style-name="T3">　）</text:span><text:span text:style-name="T10"> 管理設備（應用層／UDP）；</text:span><text:span text:style-name="T3">（　　　　　</text:span><text:span text:style-name="T4">6</text:span><text:span text:style-name="T3">　）</text:span><text:span text:style-name="T10"> 診斷網路（網路層）。</text:span></text:p>
            <text:p text:style-name="P12"><text:span text:style-name="T10">企業資安三階段：</text:span><text:span text:style-name="T3">（　　　　　</text:span><text:span text:style-name="T4">7</text:span><text:span text:style-name="T3">　）</text:span><text:span text:style-name="T10"> → </text:span><text:span text:style-name="T3">（　　　　　</text:span><text:span text:style-name="T4">8</text:span><text:span text:style-name="T3">　）</text:span><text:span text:style-name="T10"> → </text:span><text:span text:style-name="T3">（　　　　　</text:span><text:span text:style-name="T4">9</text:span><text:span text:style-name="T3">　）</text:span><text:span text:style-name="T10">。登入時除密碼外再加一層驗證叫 </text:span><text:span text:style-name="T3">（　　　　　</text:span><text:span text:style-name="T4">10</text:span><text:span text:style-name="T3">　）</text:span><text:span text:style-name="T10">。</text:span></text:p>
            <text:p text:style-name="P12"><text:span text:style-name="T10">復原指標：能停多久＝</text:span><text:span text:style-name="T3">（　　　　　</text:span><text:span text:style-name="T4">11</text:span><text:span text:style-name="T3">　）</text:span><text:span text:style-name="T10">（停機時間）；能丟幾小時資料＝</text:span><text:span text:style-name="T3">（　　　　　</text:span><text:span text:style-name="T4">12</text:span><text:span text:style-name="T3">　）</text:span><text:span text:style-name="T10">（資料損失量）。公司遇災仍能持續運作的計畫叫 </text:span><text:span text:style-name="T3">（　　　　　</text:span><text:span text:style-name="T4">13</text:span><text:span text:style-name="T3">　）</text:span><text:span text:style-name="T10">。</text:span></text:p>
            <text:p text:style-name="P12"><text:span text:style-name="T10">自己買工具守的是 </text:span><text:span text:style-name="T3">（　　　　　</text:span><text:span text:style-name="T4">14</text:span><text:span text:style-name="T3">　）</text:span><text:span text:style-name="T10">；委外請資安公司 24 小時守的是 </text:span><text:span text:style-name="T3">（　　　　　</text:span><text:span text:style-name="T4">15</text:span><text:span text:style-name="T3">　）</text:span><text:span text:style-name="T10">。全球通用的駭客手法知識庫叫 </text:span><text:span text:style-name="T3">（　　　　　</text:span><text:span text:style-name="T4">16</text:span><text:span text:style-name="T3">　）</text:span><text:span text:style-name="T10">。</text:span></text:p>
            <text:p text:style-name="P12"><text:span text:style-name="T10">軟體開發六階段都納入資安叫 </text:span><text:span text:style-name="T3">（　　　　　</text:span><text:span text:style-name="T4">17</text:span><text:span text:style-name="T3">　）</text:span><text:span text:style-name="T10">，核心精神是 </text:span><text:span text:style-name="T3">（　　　　　</text:span><text:span text:style-name="T4">18</text:span><text:span text:style-name="T3">　）</text:span><text:span text:style-name="T10">；國際資安管理制度標準 ISO 27001 涵蓋四面向：人、技術、組織、</text:span><text:span text:style-name="T3">（　　　　　</text:span><text:span text:style-name="T4">19</text:span><text:span text:style-name="T3">　）</text:span><text:span text:style-name="T10">。</text:span></text:p>
          </table:table-cell>
        </table:table-row>
        <table:table-row table:style-name="表格11.1">
          <table:table-cell table:style-name="表格11.A3" office:value-type="string">
            <text:p text:style-name="P8"><text:span text:style-name="T9">🔐 <text:s/></text:span><text:span text:style-name="T6">丙、Zero Trust 填空</text:span></text:p>
            <text:p text:style-name="P11"><text:span text:style-name="T10">Zero Trust 核心一句話：</text:span><text:span text:style-name="T3">（　　　　　</text:span><text:span text:style-name="T4">1</text:span><text:span text:style-name="T3">　）</text:span><text:span text:style-name="T10">（Never Trust, Always Verify）。</text:span></text:p>
            <text:p text:style-name="P12"><text:span text:style-name="T10">三大支柱「人、機、境」：人＝</text:span><text:span text:style-name="T3">（　　　　　</text:span><text:span text:style-name="T4">2</text:span><text:span text:style-name="T3">　）</text:span><text:span text:style-name="T10">、機＝</text:span><text:span text:style-name="T3">（　　　　　</text:span><text:span text:style-name="T4">3</text:span><text:span text:style-name="T3">　）</text:span><text:span text:style-name="T10">、境＝</text:span><text:span text:style-name="T3">（　　　　　</text:span><text:span text:style-name="T4">4</text:span><text:span text:style-name="T3">　）</text:span><text:span text:style-name="T10">。</text:span></text:p>
            <text:p text:style-name="P12"><text:span text:style-name="T10">四大機制：</text:span><text:span text:style-name="T3">（　　　　　</text:span><text:span text:style-name="T4">5</text:span><text:span text:style-name="T3">　）</text:span><text:span text:style-name="T10"> ＋ </text:span><text:span text:style-name="T3">（　　　　　</text:span><text:span text:style-name="T4">6</text:span><text:span text:style-name="T3">　）</text:span><text:span text:style-name="T10"> ＋ </text:span><text:span text:style-name="T3">（　　　　　</text:span><text:span text:style-name="T4">7</text:span><text:span text:style-name="T3">　）</text:span><text:span text:style-name="T10"> ＋ </text:span><text:span text:style-name="T3">（　　　　　</text:span><text:span text:style-name="T4">8</text:span><text:span text:style-name="T3">　）</text:span><text:span text:style-name="T10">。</text:span></text:p>
            <text:p text:style-name="P12"><text:span text:style-name="T10">最常考陷阱：Zero Trust 把重點從「</text:span><text:span text:style-name="T3">（　　　　　</text:span><text:span text:style-name="T4">9</text:span><text:span text:style-name="T3">　）</text:span><text:span text:style-name="T10">」轉移到「身份／設備／情境」。</text:span></text:p>
          </table:table-cell>
        </table:table-row>
      </table:table>
      <text:h text:style-name="P1" text:outline-level="1"><text:span text:style-name="T12">解 答 篇　（請先自測再核對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8"><text:span text:style-name="T9">✅ <text:s/></text:span><text:span text:style-name="T16">對答案</text:span></text:p>
            <text:p text:style-name="P9"><text:span text:style-name="T10">下方依篇章列出每題答案，題號對應前面各篇的橙色括號。核對後，把寫錯的題號圈起來，回最終整合筆記對應篇章複習。</text:span></text:p>
          </table:table-cell>
        </table:table-row>
      </table:table>
      <text:h text:style-name="P2" text:outline-level="3"><text:span text:style-name="T14">▍</text:span><text:span text:style-name="T13"> 第一篇　解答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><text:span text:style-name="T11">1. TCP　　　2. UDP</text:span></text:p>
            <text:p text:style-name="P10"><text:span text:style-name="T11">3. 7　　　4. 4</text:span></text:p>
            <text:p text:style-name="P10"><text:span text:style-name="T11">5. Session　　　6. Presentation</text:span></text:p>
            <text:p text:style-name="P10"><text:span text:style-name="T11">7. IP　　　8. Routing</text:span></text:p>
            <text:p text:style-name="P10"><text:span text:style-name="T11">9. ICMP　　　10. ICMP</text:span></text:p>
            <text:p text:style-name="P10"><text:span text:style-name="T11">11. MAC　　　12. LAN（區域網路）</text:span></text:p>
            <text:p text:style-name="P10"><text:span text:style-name="T11">13. TTL　　　14. ICMP</text:span></text:p>
            <text:p text:style-name="P10"><text:span text:style-name="T11">15. 1　　　16. Time Exceeded</text:span></text:p>
          </table:table-cell>
        </table:table-row>
      </table:table>
      <text:h text:style-name="P2" text:outline-level="3"><text:span text:style-name="T14">▍</text:span><text:span text:style-name="T13"> 第二篇　解答</text:span></text:h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><text:span text:style-name="T11">1. +2　　　2. 2ⁿ</text:span></text:p>
            <text:p text:style-name="P10"><text:span text:style-name="T11">3. 32 − n　　　4. − 2</text:span></text:p>
            <text:p text:style-name="P10"><text:span text:style-name="T11">5. 廣播位址　　　6. 62</text:span></text:p>
            <text:p text:style-name="P10"><text:span text:style-name="T11">7. 30　　　8. 14</text:span></text:p>
            <text:p text:style-name="P10"><text:span text:style-name="T11">9. 2　　　10. /31</text:span></text:p>
            <text:p text:style-name="P10"><text:span text:style-name="T11">11. 連續　　　12. 2ⁿ</text:span></text:p>
            <text:p text:style-name="P10"><text:span text:style-name="T11">13. 對齊　　　14. 減 n</text:span></text:p>
            <text:p text:style-name="P10"><text:span text:style-name="T11">15. Fragmentation　　　16. 1500</text:span></text:p>
            <text:p text:style-name="P10"><text:span text:style-name="T11">17. Source（送端）　　　18. 8</text:span></text:p>
            <text:p text:style-name="P10"><text:span text:style-name="T11">19. 1　　　20. 6</text:span></text:p>
            <text:p text:style-name="P10"><text:span text:style-name="T11">21. 17　　　22. 禁止切割</text:span></text:p>
            <text:p text:style-name="P10"><text:span text:style-name="T11">23. 後面還有分段　　　24. 1460</text:span></text:p>
            <text:p text:style-name="P10"><text:span text:style-name="T11">25. Loopback（回送位址）　　　26. PMTUD</text:span></text:p>
          </table:table-cell>
        </table:table-row>
      </table:table>
      <text:h text:style-name="P2" text:outline-level="3"><text:span text:style-name="T14">▍</text:span><text:span text:style-name="T13"> 第三篇　解答</text:span>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><text:span text:style-name="T11">1. 32　　　2. 128</text:span></text:p>
            <text:p text:style-name="P10"><text:span text:style-name="T11">3. 40　　　4. IPsec</text:span></text:p>
            <text:p text:style-name="P10"><text:span text:style-name="T11">5. SLAAC　　　6. Broadcast</text:span></text:p>
            <text:p text:style-name="P10"><text:span text:style-name="T11">7. Dual Stack　　　8. AAAA</text:span></text:p>
            <text:p text:style-name="P10"><text:span text:style-name="T11">9. Tunneling　　　10. Translation（NAT64）</text:span></text:p>
          </table:table-cell>
        </table:table-row>
      </table:table>
      <text:h text:style-name="P2" text:outline-level="3"><text:span text:style-name="T14">▍</text:span><text:span text:style-name="T13"> 第四篇　解答</text:span>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><text:span text:style-name="T11">1. ARP　　　2. NAT</text:span></text:p>
            <text:p text:style-name="P10"><text:span text:style-name="T11">3. IP　　　4. MAC</text:span></text:p>
            <text:p text:style-name="P10"><text:span text:style-name="T11">5. 路由器（預設閘道）　　　6. Port</text:span></text:p>
            <text:p text:style-name="P10"><text:span text:style-name="T11">7. PAT　　　8. End-to-End（端對端）</text:span></text:p>
            <text:p text:style-name="P10"><text:span text:style-name="T11">9. ARP Spoofing　　　10. 中間人攻擊（MITM）</text:span></text:p>
            <text:p text:style-name="P10"><text:span text:style-name="T11">11. UPnP　　　12. STUN</text:span></text:p>
            <text:p text:style-name="P10"><text:soft-page-break/><text:span text:style-name="T11">13. TURN</text:span></text:p>
          </table:table-cell>
        </table:table-row>
      </table:table>
      <text:h text:style-name="P2" text:outline-level="3"><text:span text:style-name="T14">▍</text:span><text:span text:style-name="T13"> 第五篇　解答</text:span></text:h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><text:span text:style-name="T11">1. SYN　　　2. SYN+ACK</text:span></text:p>
            <text:p text:style-name="P10"><text:span text:style-name="T11">3. ACK　　　4. 雙向都能傳資料</text:span></text:p>
            <text:p text:style-name="P10"><text:span text:style-name="T11">5. SYN Flood　　　6. DoS</text:span></text:p>
            <text:p text:style-name="P10"><text:span text:style-name="T11">7. min(rwnd, cwnd)　　　8. 接收端</text:span></text:p>
            <text:p text:style-name="P10"><text:span text:style-name="T11">9. 網路　　　10. 指數</text:span></text:p>
            <text:p text:style-name="P10"><text:span text:style-name="T11">11. 線性　　　12. 1</text:span></text:p>
            <text:p text:style-name="P10"><text:span text:style-name="T11">13. 減半　　　14. cwnd / 2</text:span></text:p>
            <text:p text:style-name="P10"><text:span text:style-name="T11">15. AIMD　　　16. 0.5</text:span></text:p>
          </table:table-cell>
        </table:table-row>
      </table:table>
      <text:h text:style-name="P2" text:outline-level="3"><text:span text:style-name="T14">▍</text:span><text:span text:style-name="T13"> 第六篇　解答</text:span></text:h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><text:span text:style-name="T11">1. Cache　　　2. Root</text:span></text:p>
            <text:p text:style-name="P10"><text:span text:style-name="T11">3. TLD　　　4. Authoritative</text:span></text:p>
            <text:p text:style-name="P10"><text:span text:style-name="T11">5. Recursive（遞迴）　　　6. Iterative（反覆）</text:span></text:p>
            <text:p text:style-name="P10"><text:span text:style-name="T11">7. MX　　　8. CNAME</text:span></text:p>
            <text:p text:style-name="P10"><text:span text:style-name="T11">9. Cache Poisoning（快取污染）　　　10. DDoS 放大（反射）攻擊</text:span></text:p>
            <text:p text:style-name="P10"><text:span text:style-name="T11">11. 驗證真偽　　　12. DDoS</text:span></text:p>
          </table:table-cell>
        </table:table-row>
      </table:table>
      <text:h text:style-name="P2" text:outline-level="3"><text:span text:style-name="T14">▍</text:span><text:span text:style-name="T13"> 第七篇　解答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9"><text:span text:style-name="T11">1. IGP　　　2. EGP</text:span></text:p>
            <text:p text:style-name="P10"><text:span text:style-name="T11">3. Area 0　　　4. ABR</text:span></text:p>
            <text:p text:style-name="P10"><text:span text:style-name="T11">5. ASBR　　　6. Local Preference</text:span></text:p>
            <text:p text:style-name="P10"><text:span text:style-name="T11">7. AS-PATH　　　8. Router ID</text:span></text:p>
            <text:p text:style-name="P10"><text:span text:style-name="T11">9. 政策　　　10. Local Preference</text:span></text:p>
            <text:p text:style-name="P10"><text:span text:style-name="T11">11. 能不能走　　　12. 你是誰</text:span></text:p>
            <text:p text:style-name="P10"><text:span text:style-name="T11">13. 怎麼走</text:span></text:p>
          </table:table-cell>
        </table:table-row>
      </table:table>
      <text:h text:style-name="P2" text:outline-level="3"><text:span text:style-name="T14">▍</text:span><text:span text:style-name="T13"> 第八篇　解答</text:span>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><text:span text:style-name="T11">1. 控制平面　　　2. 資料平面</text:span></text:p>
            <text:p text:style-name="P10"><text:span text:style-name="T11">3. Control　　　4. Round Robin</text:span></text:p>
            <text:p text:style-name="P10"><text:span text:style-name="T11">5. Weighted Round Robin　　　6. Session Stickiness</text:span></text:p>
            <text:p text:style-name="P10"><text:span text:style-name="T11">7. CNAME　　　8. Edge（邊緣）</text:span></text:p>
            <text:p text:style-name="P10"><text:span text:style-name="T11">9. eMBB　　　10. URLLC</text:span></text:p>
            <text:p text:style-name="P10"><text:span text:style-name="T11">11. mMTC　　　12. Network Slicing</text:span></text:p>
          </table:table-cell>
        </table:table-row>
      </table:table>
      <text:h text:style-name="P2" text:outline-level="3"><text:span text:style-name="T14">▍</text:span><text:span text:style-name="T13"> 第九篇　解答</text:span>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><text:span text:style-name="T11">1. CSMA/CA　　　2. CSMA/CD</text:span></text:p>
            <text:p text:style-name="P10"><text:span text:style-name="T11">3. OFDM　　　4. Master</text:span></text:p>
            <text:p text:style-name="P10"><text:span text:style-name="T11">5. FHSS　　　6. EDCA</text:span></text:p>
            <text:p text:style-name="P10"><text:span text:style-name="T11">7. SCO　　　8. eSCO</text:span></text:p>
            <text:p text:style-name="P10"><text:span text:style-name="T11">9. Time Slot（時槽）　　　10. L2CAP</text:span></text:p>
            <text:p text:style-name="P10"><text:span text:style-name="T11">11. 資料鏈結層（Data Link）　　　12. Signaling Channel</text:span></text:p>
          </table:table-cell>
        </table:table-row>
      </table:table>
      <text:h text:style-name="P2" text:outline-level="3"><text:soft-page-break/><text:span text:style-name="T14">▍</text:span><text:span text:style-name="T13"> 第十篇·甲（設備與攻防）　解答</text:span>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><text:span text:style-name="T11">1. L3/L4　　　2. L7</text:span></text:p>
            <text:p text:style-name="P10"><text:span text:style-name="T11">3. DPI　　　4. DMZ</text:span></text:p>
            <text:p text:style-name="P10"><text:span text:style-name="T11">5. Domain　　　6. Hash</text:span></text:p>
            <text:p text:style-name="P10"><text:span text:style-name="T11">7. C2 Server　　　8. 事後證據</text:span></text:p>
            <text:p text:style-name="P10"><text:span text:style-name="T11">9. Proxy（正向代理）　　　10. Reverse Proxy（反向代理）</text:span></text:p>
            <text:p text:style-name="P10"><text:span text:style-name="T11">11. ' OR 1=1 --　　　12. Prepared Statement（預備語句）</text:span></text:p>
            <text:p text:style-name="P10"><text:span text:style-name="T11">13. Zero-Day　　　14. Signature（特徵碼）</text:span></text:p>
          </table:table-cell>
        </table:table-row>
      </table:table>
      <text:h text:style-name="P2" text:outline-level="3"><text:span text:style-name="T14">▍</text:span><text:span text:style-name="T13"> 第十篇·乙（偵測與企業資安）　解答</text:span>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9"><text:span text:style-name="T11">1. 偵測/警報（不阻擋）　　　2. 阻擋</text:span></text:p>
            <text:p text:style-name="P10"><text:span text:style-name="T11">3. Log　　　4. 封包</text:span></text:p>
            <text:p text:style-name="P10"><text:span text:style-name="T11">5. SNMP　　　6. ICMP</text:span></text:p>
            <text:p text:style-name="P10"><text:span text:style-name="T11">7. 事前預防　　　8. 事中偵測</text:span></text:p>
            <text:p text:style-name="P10"><text:span text:style-name="T11">9. 事後復原　　　10. MFA（多因素驗證）</text:span></text:p>
            <text:p text:style-name="P10"><text:span text:style-name="T11">11. RTO　　　12. RPO</text:span></text:p>
            <text:p text:style-name="P10"><text:span text:style-name="T11">13. BCP　　　14. EDR</text:span></text:p>
            <text:p text:style-name="P10"><text:span text:style-name="T11">15. MDR　　　16. MITRE ATT&amp;CK</text:span></text:p>
            <text:p text:style-name="P10"><text:span text:style-name="T11">17. SSDLC　　　18. 左移（Shift Left）</text:span></text:p>
            <text:p text:style-name="P10"><text:span text:style-name="T11">19. 實體</text:span></text:p>
          </table:table-cell>
        </table:table-row>
      </table:table>
      <text:h text:style-name="P2" text:outline-level="3"><text:span text:style-name="T14">▍</text:span><text:span text:style-name="T13"> 第十篇·丙（Zero Trust）　解答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><text:span text:style-name="T11">1. 永不信任，始終驗證　　　2. Identity（身份）</text:span></text:p>
            <text:p text:style-name="P10"><text:span text:style-name="T11">3. Device（設備）　　　4. Context（情境）</text:span></text:p>
            <text:p text:style-name="P10"><text:span text:style-name="T11">5. MFA　　　6. 最小權限（Least Privilege）</text:span></text:p>
            <text:p text:style-name="P10"><text:span text:style-name="T11">7. 微分段（Micro-Segmentation）　　　8. 持續監控（Continuous Monitoring）</text:span></text:p>
            <text:p text:style-name="P10"><text:span text:style-name="T11">9. 位置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網路與資安 · 克漏字練習</text:span></text:p>
      </style:header>
      <style:footer>
        <text:p text:style-name="MP2"><text:span text:style-name="MT1">考前自我測驗　·　第 </text:span><text:page-number text:select-page="current">14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與資安 克漏字練習</dc:title>
    <meta:initial-creator>Claude</meta:initial-creator>
    <dc:creator>Un-named</dc:creator>
    <meta:editing-cycles>1</meta:editing-cycles>
    <meta:creation-date>2026-06-12T00:54:04.534000000</meta:creation-date>
    <dc:date>2026-06-12T00:54:04.534000000</dc:date>
    <meta:document-statistic meta:table-count="24" meta:image-count="0" meta:object-count="0" meta:page-count="14" meta:paragraph-count="194" meta:word-count="3518" meta:character-count="7211" meta:non-whitespace-character-count="5165"/>
    <meta:generator>MODA_ODF_Application_Tools/3.8.4.2$Windows_X86_64 LibreOffice_project/4fb77107d5af14329e08085efe4fa19b5633383a</meta:generator>
  </office:meta>
</office:document-meta>
</file>