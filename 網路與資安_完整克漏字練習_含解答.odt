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56cm" fo:margin-top="0cm" fo:margin-bottom="0cm" table:align="left" style:writing-mode="page"/>
    </style:style>
    <style:style style:name="表格1.A" style:family="table-column">
      <style:table-column-properties style:column-width="16.933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2.A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56cm" fo:margin-top="0cm" fo:margin-bottom="0cm" table:align="left" style:writing-mode="page"/>
    </style:style>
    <style:style style:name="表格14.A" style:family="table-column">
      <style:table-column-properties style:column-width="16.933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5" style:family="table">
      <style:table-properties style:width="16.933cm" fo:margin-left="0.056cm" fo:margin-top="0cm" fo:margin-bottom="0cm" table:align="left" style:writing-mode="page"/>
    </style:style>
    <style:style style:name="表格15.A" style:family="table-column">
      <style:table-column-properties style:column-width="16.93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6" style:family="table">
      <style:table-properties style:width="16.933cm" fo:margin-left="0.056cm" fo:margin-top="0cm" fo:margin-bottom="0cm" table:align="left" style:writing-mode="page"/>
    </style:style>
    <style:style style:name="表格16.A" style:family="table-column">
      <style:table-column-properties style:column-width="16.93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7" style:family="table">
      <style:table-properties style:width="16.933cm" fo:margin-left="0.056cm" fo:margin-top="0cm" fo:margin-bottom="0cm" table:align="left" style:writing-mode="page"/>
    </style:style>
    <style:style style:name="表格17.A" style:family="table-column">
      <style:table-column-properties style:column-width="16.933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8" style:family="table">
      <style:table-properties style:width="16.933cm" fo:margin-left="0.056cm" fo:margin-top="0cm" fo:margin-bottom="0cm" table:align="left" style:writing-mode="page"/>
    </style:style>
    <style:style style:name="表格18.A" style:family="table-column">
      <style:table-column-properties style:column-width="16.93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9" style:family="table">
      <style:table-properties style:width="16.933cm" fo:margin-left="0.056cm" fo:margin-top="0cm" fo:margin-bottom="0cm" table:align="left" style:writing-mode="page"/>
    </style:style>
    <style:style style:name="表格19.A" style:family="table-column">
      <style:table-column-properties style:column-width="16.933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20" style:family="table">
      <style:table-properties style:width="16.933cm" fo:margin-left="0.056cm" fo:margin-top="0cm" fo:margin-bottom="0cm" table:align="left" style:writing-mode="page"/>
    </style:style>
    <style:style style:name="表格20.A" style:family="table-column">
      <style:table-column-properties style:column-width="16.933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21" style:family="table">
      <style:table-properties style:width="16.933cm" fo:margin-left="0.056cm" fo:margin-top="0cm" fo:margin-bottom="0cm" table:align="left" style:writing-mode="page"/>
    </style:style>
    <style:style style:name="表格21.A" style:family="table-column">
      <style:table-column-properties style:column-width="16.933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22" style:family="table">
      <style:table-properties style:width="16.933cm" fo:margin-left="0.056cm" fo:margin-top="0cm" fo:margin-bottom="0cm" table:align="left" style:writing-mode="page"/>
    </style:style>
    <style:style style:name="表格22.A" style:family="table-column">
      <style:table-column-properties style:column-width="16.933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23" style:family="table">
      <style:table-properties style:width="16.933cm" fo:margin-left="0.056cm" fo:margin-top="0cm" fo:margin-bottom="0cm" table:align="left" style:writing-mode="page"/>
    </style:style>
    <style:style style:name="表格23.A" style:family="table-column">
      <style:table-column-properties style:column-width="16.933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24" style:family="table">
      <style:table-properties style:width="16.933cm" fo:margin-left="0.056cm" fo:margin-top="0cm" fo:margin-bottom="0cm" table:align="left" style:writing-mode="page"/>
    </style:style>
    <style:style style:name="表格24.A" style:family="table-column">
      <style:table-column-properties style:column-width="16.933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25" style:family="table">
      <style:table-properties style:width="16.933cm" fo:margin-left="0.056cm" fo:margin-top="0cm" fo:margin-bottom="0cm" table:align="left" style:writing-mode="page"/>
    </style:style>
    <style:style style:name="表格25.A" style:family="table-column">
      <style:table-column-properties style:column-width="16.933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56cm" fo:margin-top="0cm" fo:margin-bottom="0cm" table:align="left" style:writing-mode="page"/>
    </style:style>
    <style:style style:name="表格27.A" style:family="table-column">
      <style:table-column-properties style:column-width="16.933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28" style:family="table">
      <style:table-properties style:width="16.933cm" fo:margin-left="0.056cm" fo:margin-top="0cm" fo:margin-bottom="0cm" table:align="left" style:writing-mode="page"/>
    </style:style>
    <style:style style:name="表格28.A" style:family="table-column">
      <style:table-column-properties style:column-width="16.93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29" style:family="table">
      <style:table-properties style:width="16.933cm" fo:margin-left="0.056cm" fo:margin-top="0cm" fo:margin-bottom="0cm" table:align="left" style:writing-mode="page"/>
    </style:style>
    <style:style style:name="表格29.A" style:family="table-column">
      <style:table-column-properties style:column-width="16.93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0" style:family="table">
      <style:table-properties style:width="16.933cm" fo:margin-left="0.056cm" fo:margin-top="0cm" fo:margin-bottom="0cm" table:align="left" style:writing-mode="page"/>
    </style:style>
    <style:style style:name="表格30.A" style:family="table-column">
      <style:table-column-properties style:column-width="16.93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1" style:family="table">
      <style:table-properties style:width="16.933cm" fo:margin-left="0.056cm" fo:margin-top="0cm" fo:margin-bottom="0cm" table:align="left" style:writing-mode="page"/>
    </style:style>
    <style:style style:name="表格31.A" style:family="table-column">
      <style:table-column-properties style:column-width="16.933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2" style:family="table">
      <style:table-properties style:width="16.933cm" fo:margin-left="0.056cm" fo:margin-top="0cm" fo:margin-bottom="0cm" table:align="left" style:writing-mode="page"/>
    </style:style>
    <style:style style:name="表格32.A" style:family="table-column">
      <style:table-column-properties style:column-width="16.93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16.933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7" style:family="table">
      <style:table-properties style:width="16.933cm" fo:margin-left="0.056cm" fo:margin-top="0cm" fo:margin-bottom="0cm" table:align="left" style:writing-mode="page"/>
    </style:style>
    <style:style style:name="表格37.A" style:family="table-column">
      <style:table-column-properties style:column-width="16.933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39" style:family="table">
      <style:table-properties style:width="16.933cm" fo:margin-left="0.056cm" fo:margin-top="0cm" fo:margin-bottom="0cm" table:align="left" style:writing-mode="page"/>
    </style:style>
    <style:style style:name="表格39.A" style:family="table-column">
      <style:table-column-properties style:column-width="16.933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0" style:family="table">
      <style:table-properties style:width="16.933cm" fo:margin-left="0.056cm" fo:margin-top="0cm" fo:margin-bottom="0cm" table:align="left" style:writing-mode="page"/>
    </style:style>
    <style:style style:name="表格40.A" style:family="table-column">
      <style:table-column-properties style:column-width="16.93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1" style:family="table">
      <style:table-properties style:width="16.933cm" fo:margin-left="0.056cm" fo:margin-top="0cm" fo:margin-bottom="0cm" table:align="left" style:writing-mode="page"/>
    </style:style>
    <style:style style:name="表格41.A" style:family="table-column">
      <style:table-column-properties style:column-width="16.933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4" style:family="table">
      <style:table-properties style:width="16.933cm" fo:margin-left="0.056cm" fo:margin-top="0cm" fo:margin-bottom="0cm" table:align="left" style:writing-mode="page"/>
    </style:style>
    <style:style style:name="表格44.A" style:family="table-column">
      <style:table-column-properties style:column-width="16.933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表格47" style:family="table">
      <style:table-properties style:width="16.933cm" fo:margin-left="0.056cm" fo:margin-top="0cm" fo:margin-bottom="0cm" table:align="left" style:writing-mode="page"/>
    </style:style>
    <style:style style:name="表格47.A" style:family="table-column">
      <style:table-column-properties style:column-width="16.93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25pt solid #2f7a4d" fo:border-bottom="0.25pt solid #2f7a4d">
        <style:background-image/>
      </style:table-cell-properties>
    </style:style>
    <style:style style:name="P1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2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3" style:family="paragraph" style:parent-style-name="Heading_20_3">
      <style:paragraph-properties fo:margin-top="0.318cm" fo:margin-bottom="0.123cm" style:contextual-spacing="false"/>
    </style:style>
    <style:style style:name="P4" style:family="paragraph" style:parent-style-name="Standard">
      <style:paragraph-properties fo:margin-top="2.822cm" fo:margin-bottom="0cm" style:contextual-spacing="false"/>
    </style:style>
    <style:style style:name="P5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7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8" style:family="paragraph" style:parent-style-name="Standard">
      <style:paragraph-properties fo:margin-top="0.071cm" fo:margin-bottom="0.353cm" style:contextual-spacing="false" fo:text-align="center" style:justify-single-word="false"/>
    </style:style>
    <style:style style:name="P9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046cm" style:contextual-spacing="false" fo:line-height="0.512cm"/>
    </style:style>
    <style:style style:name="P14" style:family="paragraph" style:parent-style-name="Standard">
      <style:paragraph-properties fo:margin-top="0.046cm" fo:margin-bottom="0.046cm" style:contextual-spacing="false" fo:line-height="0.512cm"/>
    </style:style>
    <style:style style:name="P15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5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" style:family="text">
      <style:text-properties fo:color="#c96a1e" loext:opacity="100%" style:font-name="Microsoft JhengHei" fo:font-size="8pt" fo:font-style="normal" fo:font-weight="bold" style:font-name-asian="Microsoft JhengHei2" style:font-size-asian="8pt" style:font-style-asian="normal" style:font-weight-asian="bold" style:font-name-complex="Microsoft JhengHei2" style:font-size-complex="8pt" style:font-style-complex="normal" style:font-weight-complex="bold"/>
    </style:style>
    <style:style style:name="T7" style:family="text">
      <style:text-properties fo:color="#1f3a5c" loext:opacity="100%" style:font-name="Microsoft JhengHei" fo:font-size="23pt" fo:font-weight="bold" style:font-name-asian="Microsoft JhengHei2" style:font-size-asian="23pt" style:font-weight-asian="bold" style:font-name-complex="Microsoft JhengHei2" style:font-size-complex="23pt" style:font-weight-complex="bold"/>
    </style:style>
    <style:style style:name="T8" style:family="text">
      <style:text-properties fo:color="#1f3a5c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9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555555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1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T12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13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4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1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19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0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1">公職考試 · 資訊類</text:span></text:p>
      <text:p text:style-name="P6"><text:span text:style-name="T7">網路與資安　完整克漏字</text:span></text:p>
      <text:p text:style-name="P7"><text:span text:style-name="T8">全篇逐節挖空 · 含完整解答</text:span></text:p>
      <text:p text:style-name="P8"><text:span text:style-name="T10">對應《完整整合筆記 最終版》十篇全文深度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><text:span text:style-name="T12">✏️ <text:s/></text:span><text:span text:style-name="T2">完整克漏字練習說明</text:span></text:p>
            <text:p text:style-name="P11"><text:span text:style-name="T3">使用方式：</text:span><text:span text:style-name="T13">每個橙色括號（　 n 　）為一個空格。先蓋住最後「解答篇」，憑記憶填入，再依篇對照。題號與各篇橙色括號一一對應。</text:span></text:p>
            <text:p text:style-name="P12"><text:span text:style-name="T3">三輪節奏：</text:span><text:span text:style-name="T13">① 可翻筆記找答案 → ② 闔上筆記只憑記憶 → ③ 只做前兩輪寫錯的題號；間隔 1／3／7 天各做一次。</text:span></text:p>
            <text:p text:style-name="P12"><text:span text:style-name="T3">涵蓋範圍：</text:span><text:span text:style-name="T13">不只口訣，連定義、表格欄位、流程步驟、比較差異、考試陷阱（✗→✓）與申論標準答案都挖空，深度等同完整筆記。</text:span></text:p>
          </table:table-cell>
        </table:table-row>
      </table:table>
      <text:h text:style-name="P1" text:outline-level="1"><text:span text:style-name="T16">第 一 篇　網路基礎架構</text:span></text:h>
      <text:p text:style-name="P2"><text:span text:style-name="T4">一、分層與 OSI / TCP-IP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2">📮 <text:s/></text:span><text:span text:style-name="T17">寄信分層填空</text:span></text:p>
            <text:p text:style-name="P13"><text:span text:style-name="T14">用寄信理解分層：應用層決定「</text:span><text:span text:style-name="T5">（　　　</text:span><text:span text:style-name="T6">1</text:span><text:span text:style-name="T5">　　）</text:span><text:span text:style-name="T14">」；傳輸層負責切分、編號與 </text:span><text:span text:style-name="T5">（　　　</text:span><text:span text:style-name="T6">2</text:span><text:span text:style-name="T5">　　）</text:span><text:span text:style-name="T14">；網路層負責「寫地址＋</text:span><text:span text:style-name="T5">（　　　</text:span><text:span text:style-name="T6">3</text:span><text:span text:style-name="T5">　　）</text:span><text:span text:style-name="T14">」；連結層負責「同一</text:span><text:span text:style-name="T5">（　　　</text:span><text:span text:style-name="T6">4</text:span><text:span text:style-name="T5">　　）</text:span><text:span text:style-name="T14">內的傳輸」。</text:span></text:p>
            <text:p text:style-name="P14"><text:span text:style-name="T14">舊版常見錯誤更正：IP 位址其實屬於 </text:span><text:span text:style-name="T5">（　　　</text:span><text:span text:style-name="T6">5</text:span><text:span text:style-name="T5">　　）</text:span><text:span text:style-name="T14">（不是應用層）；跨網路的路由是 </text:span><text:span text:style-name="T5">（　　　</text:span><text:span text:style-name="T6">6</text:span><text:span text:style-name="T5">　　）</text:span><text:span text:style-name="T14"> 的工作（不是連結層）。</text:span></text:p>
          </table:table-cell>
        </table:table-row>
        <table:table-row table:style-name="表格2.1">
          <table:table-cell table:style-name="表格2.A2" office:value-type="string">
            <text:p text:style-name="P10"><text:span text:style-name="T12">📊 <text:s/></text:span><text:span text:style-name="T17">OSI vs TCP/IP 對照填空</text:span></text:p>
            <text:p text:style-name="P13"><text:span text:style-name="T14">OSI 共 </text:span><text:span text:style-name="T5">（　　　</text:span><text:span text:style-name="T6">7</text:span><text:span text:style-name="T5">　　）</text:span><text:span text:style-name="T14"> 層、TCP/IP 共 </text:span><text:span text:style-name="T5">（　　　</text:span><text:span text:style-name="T6">8</text:span><text:span text:style-name="T5">　　）</text:span><text:span text:style-name="T14"> 層。OSI 第 6 層是 </text:span><text:span text:style-name="T5">（　　　</text:span><text:span text:style-name="T6">9</text:span><text:span text:style-name="T5">　　）</text:span><text:span text:style-name="T14">（負責格式轉換、加解密、壓縮）、第 5 層是 </text:span><text:span text:style-name="T5">（　　　</text:span><text:span text:style-name="T6">10</text:span><text:span text:style-name="T5">　　）</text:span><text:span text:style-name="T14">（建立維持終止連線），兩者在 TCP/IP 中都併入 </text:span><text:span text:style-name="T5">（　　　</text:span><text:span text:style-name="T6">11</text:span><text:span text:style-name="T5">　　）</text:span><text:span text:style-name="T14">。</text:span></text:p>
            <text:p text:style-name="P14"><text:span text:style-name="T14">OSI 第 2 層 Data Link 負責 </text:span><text:span text:style-name="T5">（　　　</text:span><text:span text:style-name="T6">12</text:span><text:span text:style-name="T5">　　）</text:span><text:span text:style-name="T14"> 與區網傳輸；第 1 層 </text:span><text:span text:style-name="T5">（　　　</text:span><text:span text:style-name="T6">13</text:span><text:span text:style-name="T5">　　）</text:span><text:span text:style-name="T14"> 負責電/光訊號與無線電波，兩者在 TCP/IP 併入 </text:span><text:span text:style-name="T5">（　　　</text:span><text:span text:style-name="T6">14</text:span><text:span text:style-name="T5">　　）</text:span><text:span text:style-name="T14">。</text:span></text:p>
          </table:table-cell>
        </table:table-row>
      </table:table>
      <text:p text:style-name="P2"><text:span text:style-name="T4">二、各層協定與詳解</text:span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2">🔌 <text:s/></text:span><text:span text:style-name="T17">協定填空</text:span></text:p>
            <text:p text:style-name="P13"><text:span text:style-name="T14">應用層協定範例：HTTP/HTTPS、DNS、</text:span><text:span text:style-name="T5">（　　　</text:span><text:span text:style-name="T6">1</text:span><text:span text:style-name="T5">　　）</text:span><text:span text:style-name="T14">、SSH、</text:span><text:span text:style-name="T5">（　　　</text:span><text:span text:style-name="T6">2</text:span><text:span text:style-name="T5">　　）</text:span><text:span text:style-name="T14">。傳輸層：TCP、</text:span><text:span text:style-name="T5">（　　　</text:span><text:span text:style-name="T6">3</text:span><text:span text:style-name="T5">　　）</text:span><text:span text:style-name="T14">。網路層：IP、</text:span><text:span text:style-name="T5">（　　　</text:span><text:span text:style-name="T6">4</text:span><text:span text:style-name="T5">　　）</text:span><text:span text:style-name="T14">。連結層：Ethernet、</text:span><text:span text:style-name="T5">（　　　</text:span><text:span text:style-name="T6">5</text:span><text:span text:style-name="T5">　　）</text:span><text:span text:style-name="T14">。</text:span></text:p>
            <text:p text:style-name="P14"><text:span text:style-name="T14">DHCP 的作用是連網時 </text:span><text:span text:style-name="T5">（　　　</text:span><text:span text:style-name="T6">6</text:span><text:span text:style-name="T5">　　）</text:span><text:span text:style-name="T14">；SSH 是 </text:span><text:span text:style-name="T5">（　　　</text:span><text:span text:style-name="T6">7</text:span><text:span text:style-name="T5">　　）</text:span><text:span text:style-name="T14">；MQTT 是 IoT 常用的 </text:span><text:span text:style-name="T5">（　　　</text:span><text:span text:style-name="T6">8</text:span><text:span text:style-name="T5">　　）</text:span><text:span text:style-name="T14"> 輕量協定；OSPF 幫路由器計算 </text:span><text:span text:style-name="T5">（　　　</text:span><text:span text:style-name="T6">9</text:span><text:span text:style-name="T5">　　）</text:span><text:span text:style-name="T14">。</text:span></text:p>
            <text:p text:style-name="P14"><text:span text:style-name="T14">OSPF 分層備註：在 OSI 屬第 </text:span><text:span text:style-name="T5">（　　　</text:span><text:span text:style-name="T6">10</text:span><text:span text:style-name="T5">　　）</text:span><text:span text:style-name="T14"> 層；在 TCP/IP 因直接跑在 IP 上，通常歸 </text:span><text:span text:style-name="T5">（　　　</text:span><text:span text:style-name="T6">11</text:span><text:span text:style-name="T5">　　）</text:span><text:span text:style-name="T14"> 層。</text:span></text:p>
          </table:table-cell>
        </table:table-row>
      </table:table>
      <text:p text:style-name="P2"><text:span text:style-name="T4">三、網路層三工作、TCP/UDP、ARP、Traceroute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><text:span text:style-name="T12">🛠️ <text:s/></text:span><text:span text:style-name="T17">網路層與工具填空</text:span></text:p>
            <text:p text:style-name="P13"><text:span text:style-name="T14">網路層三件事：</text:span><text:span text:style-name="T5">（　　　</text:span><text:span text:style-name="T6">1</text:span><text:span text:style-name="T5">　　）</text:span><text:span text:style-name="T14"> 定位、</text:span><text:span text:style-name="T5">（　　　</text:span><text:span text:style-name="T6">2</text:span><text:span text:style-name="T5">　　）</text:span><text:span text:style-name="T14"> 選路、</text:span><text:span text:style-name="T5">（　　　</text:span><text:span text:style-name="T6">3</text:span><text:span text:style-name="T5">　　）</text:span><text:span text:style-name="T14"> 錯誤回報。ping 送出 ICMP </text:span><text:span text:style-name="T5">（　　　</text:span><text:span text:style-name="T6">4</text:span><text:span text:style-name="T5">　　）</text:span><text:span text:style-name="T14">，對方回 ICMP </text:span><text:span text:style-name="T5">（　　　</text:span><text:span text:style-name="T6">5</text:span><text:span text:style-name="T5">　　）</text:span><text:span text:style-name="T14">，完全不走 TCP/UDP。</text:span></text:p>
            <text:p text:style-name="P14"><text:span text:style-name="T14">TCP vs UDP：TCP 需 </text:span><text:span text:style-name="T5">（　　　</text:span><text:span text:style-name="T6">6</text:span><text:span text:style-name="T5">　　）</text:span><text:span text:style-name="T14">、保證送達會 </text:span><text:span text:style-name="T5">（　　　</text:span><text:span text:style-name="T6">7</text:span><text:span text:style-name="T5">　　）</text:span><text:span text:style-name="T14">、速度較 </text:span><text:span text:style-name="T5">（　　　</text:span><text:span text:style-name="T6">8</text:span><text:span text:style-name="T5">　　）</text:span><text:span text:style-name="T14">；UDP 無連線、不保證、速度較 </text:span><text:span text:style-name="T5">（　　　</text:span><text:span text:style-name="T6">9</text:span><text:span text:style-name="T5">　　）</text:span><text:span text:style-name="T14">，常用於串流、VoIP、</text:span><text:span text:style-name="T5">（　　　</text:span><text:span text:style-name="T6">10</text:span><text:span text:style-name="T5">　　）</text:span><text:span text:style-name="T14">。</text:span></text:p>
            <text:p text:style-name="P14"><text:span text:style-name="T14">ARP ＝ 用 </text:span><text:span text:style-name="T5">（　　　</text:span><text:span text:style-name="T6">11</text:span><text:span text:style-name="T5">　　）</text:span><text:span text:style-name="T14"> 找 </text:span><text:span text:style-name="T5">（　　　</text:span><text:span text:style-name="T6">12</text:span><text:span text:style-name="T5">　　）</text:span><text:span text:style-name="T14">，因作用範圍僅限同一 LAN 故屬 </text:span><text:span text:style-name="T5">（　　　</text:span><text:span text:style-name="T6">13</text:span><text:span text:style-name="T5">　　）</text:span><text:span text:style-name="T14"> 層。流程：先查 </text:span><text:span text:style-name="T5">（　　　</text:span><text:span text:style-name="T6">14</text:span><text:span text:style-name="T5">　　）</text:span><text:span text:style-name="T14"> → 沒有就 </text:span><text:span text:style-name="T5">（　　　</text:span><text:span text:style-name="T6">15</text:span><text:span text:style-name="T5">　　）</text:span><text:span text:style-name="T14"> Request → 目標 </text:span><text:span text:style-name="T5">（　　　</text:span><text:span text:style-name="T6">16</text:span><text:span text:style-name="T5">　　）</text:span><text:span text:style-name="T14"> Reply → 存入快取。</text:span></text:p>
            <text:p text:style-name="P14"><text:span text:style-name="T14">Traceroute 利用 </text:span><text:span text:style-name="T5">（　　　</text:span><text:span text:style-name="T6">17</text:span><text:span text:style-name="T5">　　）</text:span><text:span text:style-name="T14"> 遞增 ＋ ICMP 回報；TTL 每過一個 Router 減 </text:span><text:span text:style-name="T5">（　　　</text:span><text:span text:style-name="T6">18</text:span><text:span text:style-name="T5">　　）</text:span><text:span text:style-name="T14">，歸零時回傳 ICMP </text:span><text:span text:style-name="T5">（　　　</text:span><text:span text:style-name="T6">19</text:span><text:span text:style-name="T5">　　）</text:span><text:span text:style-name="T14">。常見初始 TTL：Linux=</text:span><text:span text:style-name="T5">（　　　</text:span><text:span text:style-name="T6">20</text:span><text:span text:style-name="T5">　　）</text:span><text:span text:style-name="T14">、Windows=</text:span><text:span text:style-name="T5">（　　　</text:span><text:span text:style-name="T6">21</text:span><text:span text:style-name="T5">　　）</text:span><text:span text:style-name="T14">。</text:span></text:p>
          </table:table-cell>
        </table:table-row>
      </table:table>
      <text:h text:style-name="P1" text:outline-level="1"><text:span text:style-name="T16">第 二 篇　IP 位址與封包處理</text:span></text:h>
      <text:p text:style-name="P2"><text:span text:style-name="T4">一、IP 基礎、分類、保留位址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><text:span text:style-name="T12">📍 <text:s/></text:span><text:span text:style-name="T17">位址與分類填空</text:span></text:p>
            <text:p text:style-name="P13"><text:span text:style-name="T14">IPv4 共 </text:span><text:span text:style-name="T5">（　　　</text:span><text:span text:style-name="T6">1</text:span><text:span text:style-name="T5">　　）</text:span><text:span text:style-name="T14"> bit，分成 4 組（Octet），每組 8 bit、範圍 0～</text:span><text:span text:style-name="T5">（　　　</text:span><text:span text:style-name="T6">2</text:span><text:span text:style-name="T5">　　）</text:span><text:span text:style-name="T14">。若有 n 個 bit 可變，組合數為 </text:span><text:span text:style-name="T5">（　　　</text:span><text:span text:style-name="T6">3</text:span><text:span text:style-name="T5">　　）</text:span><text:span text:style-name="T14">，所以子網 IP 數一定是 2 的次方。</text:span></text:p>
            <text:p text:style-name="P14"><text:span text:style-name="T14">分類：A 類第一組 1～</text:span><text:span text:style-name="T5">（　　　</text:span><text:span text:style-name="T6">4</text:span><text:span text:style-name="T5">　　）</text:span><text:span text:style-name="T14">（遮罩 /8）、B 類 128～</text:span><text:span text:style-name="T5">（　　　</text:span><text:span text:style-name="T6">5</text:span><text:span text:style-name="T5">　　）</text:span><text:span text:style-name="T14">（/16）、C 類 192～</text:span><text:span text:style-name="T5">（　　　</text:span><text:span text:style-name="T6">6</text:span><text:span text:style-name="T5">　　）</text:span><text:span text:style-name="T14">（/24）。</text:span></text:p>
            <text:p text:style-name="P14"><text:span text:style-name="T14">保留位址：127.0.0.1 是 </text:span><text:span text:style-name="T5">（　　　</text:span><text:span text:style-name="T6">7</text:span><text:span text:style-name="T5">　　）</text:span><text:span text:style-name="T14">；224～239 是 </text:span><text:span text:style-name="T5">（　　　</text:span><text:span text:style-name="T6">8</text:span><text:span text:style-name="T5">　　）</text:span><text:span text:style-name="T14">；240～255 是 </text:span><text:span text:style-name="T5">（　　　</text:span><text:span text:style-name="T6">9</text:span><text:span text:style-name="T5">　　）</text:span><text:span text:style-name="T14">。</text:span></text:p>
          </table:table-cell>
        </table:table-row>
      </table:table>
      <text:p text:style-name="P2"><text:span text:style-name="T4">二、CIDR、可用主機、VLSM、合併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><text:span text:style-name="T12">📐 <text:s/></text:span><text:span text:style-name="T17">子網計算填空</text:span></text:p>
            <text:p text:style-name="P13"><text:span text:style-name="T14">CIDR /幾 代表前幾個 bit 是 </text:span><text:span text:style-name="T5">（　　　</text:span><text:span text:style-name="T6">1</text:span><text:span text:style-name="T5">　　）</text:span><text:span text:style-name="T14">，其餘為主機部分。/26 的主機 bit 有 </text:span><text:span text:style-name="T5">（　　　</text:span><text:span text:style-name="T6">2</text:span><text:span text:style-name="T5">　　）</text:span><text:span text:style-name="T14"> 個 → 2⁶ ＝ </text:span><text:span text:style-name="T5">（　　　</text:span><text:span text:style-name="T6">3</text:span><text:span text:style-name="T5">　　）</text:span><text:span text:style-name="T14"> 個 IP。</text:span></text:p>
            <text:p text:style-name="P14"><text:span text:style-name="T14">可用主機要 −2：扣掉第一個 </text:span><text:span text:style-name="T5">（　　　</text:span><text:span text:style-name="T6">4</text:span><text:span text:style-name="T5">　　）</text:span><text:span text:style-name="T14"> 與最後一個 </text:span><text:span text:style-name="T5">（　　　</text:span><text:span text:style-name="T6">5</text:span><text:span text:style-name="T5">　　）</text:span><text:span text:style-name="T14">。/24 可用 </text:span><text:span text:style-name="T5">（　　　</text:span><text:span text:style-name="T6">6</text:span><text:span text:style-name="T5">　　）</text:span><text:span text:style-name="T14">、/26 可用 </text:span><text:span text:style-name="T5">（　　　</text:span><text:span text:style-name="T6">7</text:span><text:span text:style-name="T5">　　）</text:span><text:span text:style-name="T14">。例外 /31（RFC </text:span><text:span text:style-name="T5">（　　　</text:span><text:span text:style-name="T6">8</text:span><text:span text:style-name="T5">　　）</text:span><text:span text:style-name="T14">）2 個全可用。</text:span></text:p>
            <text:p text:style-name="P14"><text:span text:style-name="T14">前綴速查：/25=</text:span><text:span text:style-name="T5">（　　　</text:span><text:span text:style-name="T6">9</text:span><text:span text:style-name="T5">　　）</text:span><text:span text:style-name="T14">、/27=</text:span><text:span text:style-name="T5">（　　　</text:span><text:span text:style-name="T6">10</text:span><text:span text:style-name="T5">　　）</text:span><text:span text:style-name="T14">、/28=</text:span><text:span text:style-name="T5">（　　　</text:span><text:span text:style-name="T6">11</text:span><text:span text:style-name="T5">　　）</text:span><text:span text:style-name="T14">、/29=</text:span><text:span text:style-name="T5">（　　　</text:span><text:span text:style-name="T6">12</text:span><text:span text:style-name="T5">　　）</text:span><text:span text:style-name="T14">、/30=</text:span><text:span text:style-name="T5">（　　　</text:span><text:span text:style-name="T6">13</text:span><text:span text:style-name="T5">　　）</text:span><text:span text:style-name="T14">。</text:span></text:p>
            <text:p text:style-name="P14"><text:span text:style-name="T14">VLSM 三步驟：① 需求由 </text:span><text:span text:style-name="T5">（　　　</text:span><text:span text:style-name="T6">14</text:span><text:span text:style-name="T5">　　）</text:span><text:span text:style-name="T14"> 排序 ② 各需求 </text:span><text:span text:style-name="T5">（　　　</text:span><text:span text:style-name="T6">15</text:span><text:span text:style-name="T5">　　）</text:span><text:span text:style-name="T14"> 找最小 2ⁿ、前綴＝32−n ③ 依序往後切。由大到小是為了 </text:span><text:span text:style-name="T5">（　　　</text:span><text:span text:style-name="T6">16</text:span><text:span text:style-name="T5">　　）</text:span><text:span text:style-name="T14">。</text:span></text:p>
            <text:p text:style-name="P14"><text:span text:style-name="T14">VLSM 範例（起始 192.168.1.0/24）：需 100 台 → /</text:span><text:span text:style-name="T5">（　　　</text:span><text:span text:style-name="T6">17</text:span><text:span text:style-name="T5">　　）</text:span><text:span text:style-name="T14">（0～127）；需 50 台 → /</text:span><text:span text:style-name="T5">（　　　</text:span><text:span text:style-name="T6">18</text:span><text:span text:style-name="T5">　　）</text:span><text:span text:style-name="T14">（128～191）；需 10 台 → /</text:span><text:span text:style-name="T5">（　　　</text:span><text:span text:style-name="T6">19</text:span><text:span text:style-name="T5">　　）</text:span><text:span text:style-name="T14">（192～207）。</text:span></text:p>
            <text:p text:style-name="P14"><text:span text:style-name="T14">CIDR 合併三條件：① </text:span><text:span text:style-name="T5">（　　　</text:span><text:span text:style-name="T6">20</text:span><text:span text:style-name="T5">　　）</text:span><text:span text:style-name="T14"> ② 數量為 </text:span><text:span text:style-name="T5">（　　　</text:span><text:span text:style-name="T6">21</text:span><text:span text:style-name="T5">　　）</text:span><text:span text:style-name="T14"> ③ 起點 </text:span><text:span text:style-name="T5">（　　　</text:span><text:span text:style-name="T6">22</text:span><text:span text:style-name="T5">　　）</text:span><text:span text:style-name="T14">；合併 2ⁿ 個則前綴 </text:span><text:span text:style-name="T5">（　　　</text:span><text:span text:style-name="T6">23</text:span><text:span text:style-name="T5">　　）</text:span><text:span text:style-name="T14">。例：2 個 /25 → /</text:span><text:span text:style-name="T5">（　　　</text:span><text:span text:style-name="T6">24</text:span><text:span text:style-name="T5">　　）</text:span><text:span text:style-name="T14">。</text:span></text:p>
          </table:table-cell>
        </table:table-row>
      </table:table>
      <text:p text:style-name="P2"><text:span text:style-name="T4">三、MTU、Fragmentation、IP Header、Flags、Frag DoS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><text:span text:style-name="T12">📦 <text:s/></text:span><text:span text:style-name="T17">封包處理填空</text:span></text:p>
            <text:p text:style-name="P13"><text:span text:style-name="T14">MTU ＝ 一次最多能傳的封包大小，Ethernet ＝ </text:span><text:span text:style-name="T5">（　　　</text:span><text:span text:style-name="T6">1</text:span><text:span text:style-name="T5">　　）</text:span><text:span text:style-name="T14"> bytes。封包 &gt; MTU 就要切，叫 </text:span><text:span text:style-name="T5">（　　　</text:span><text:span text:style-name="T6">2</text:span><text:span text:style-name="T5">　　）</text:span><text:span text:style-name="T14">。IPv4 由 </text:span><text:span text:style-name="T5">（　　　</text:span><text:span text:style-name="T6">3</text:span><text:span text:style-name="T5">　　）</text:span><text:span text:style-name="T14"> 切；IPv6 只由 </text:span><text:span text:style-name="T5">（　　　</text:span><text:span text:style-name="T6">4</text:span><text:span text:style-name="T5">　　）</text:span><text:span text:style-name="T14"> 切。</text:span></text:p>
            <text:p text:style-name="P14"><text:span text:style-name="T14">IP Header 無選項時固定 </text:span><text:span text:style-name="T5">（　　　</text:span><text:span text:style-name="T6">5</text:span><text:span text:style-name="T5">　　）</text:span><text:span text:style-name="T14"> bytes。Total Length 最大 </text:span><text:span text:style-name="T5">（　　　</text:span><text:span text:style-name="T6">6</text:span><text:span text:style-name="T5">　　）</text:span><text:span text:style-name="T14"> bytes；同一封包的所有分段共用同一 </text:span><text:span text:style-name="T5">（　　　</text:span><text:span text:style-name="T6">7</text:span><text:span text:style-name="T5">　　）</text:span><text:span text:style-name="T14">；Fragment Offset ＝ 起始位置 ÷ </text:span><text:span text:style-name="T5">（　　　</text:span><text:span text:style-name="T6">8</text:span><text:span text:style-name="T5">　　）</text:span><text:span text:style-name="T14">。</text:span></text:p>
            <text:p text:style-name="P14"><text:span text:style-name="T14">Protocol 值：ICMP=</text:span><text:span text:style-name="T5">（　　　</text:span><text:span text:style-name="T6">9</text:span><text:span text:style-name="T5">　　）</text:span><text:span text:style-name="T14">、TCP=</text:span><text:span text:style-name="T5">（　　　</text:span><text:span text:style-name="T6">10</text:span><text:span text:style-name="T5">　　）</text:span><text:span text:style-name="T14">、UDP=</text:span><text:span text:style-name="T5">（　　　</text:span><text:span text:style-name="T6">11</text:span><text:span text:style-name="T5">　　）</text:span><text:span text:style-name="T14">。</text:span></text:p>
            <text:p text:style-name="P14"><text:span text:style-name="T14">Flags：DF=1 代表 </text:span><text:span text:style-name="T5">（　　　</text:span><text:span text:style-name="T6">12</text:span><text:span text:style-name="T5">　　）</text:span><text:span text:style-name="T14">（太大丟棄並回 ICMP </text:span><text:span text:style-name="T5">（　　　</text:span><text:span text:style-name="T6">13</text:span><text:span text:style-name="T5">　　）</text:span><text:span text:style-name="T14">）；MF=1 代表 </text:span><text:span text:style-name="T5">（　　　</text:span><text:span text:style-name="T6">14</text:span><text:span text:style-name="T5">　　）</text:span><text:span text:style-name="T14">（最後一段 MF=0）。</text:span></text:p>
            <text:p text:style-name="P14"><text:span text:style-name="T14">PMTUD 用來找整條路徑最小的 </text:span><text:span text:style-name="T5">（　　　</text:span><text:span text:style-name="T6">15</text:span><text:span text:style-name="T5">　　）</text:span><text:span text:style-name="T14">；IPv6 因 Router 不分段而 </text:span><text:span text:style-name="T5">（　　　</text:span><text:span text:style-name="T6">16</text:span><text:span text:style-name="T5">　　）</text:span><text:span text:style-name="T14"> 使用，回應訊息為 ICMPv6 </text:span><text:span text:style-name="T5">（　　　</text:span><text:span text:style-name="T6">17</text:span><text:span text:style-name="T5">　　）</text:span><text:span text:style-name="T14">。</text:span></text:p>
            <text:p text:style-name="P14"><text:span text:style-name="T14">TCP 用 MSS 避免分段：MSS ＝ MTU − 20 − 20 ＝ </text:span><text:span text:style-name="T5">（　　　</text:span><text:span text:style-name="T6">18</text:span><text:span text:style-name="T5">　　）</text:span><text:span text:style-name="T14"> bytes，並搭配 DF=1 與 PMTUD。</text:span></text:p>
            <text:p text:style-name="P14"><text:span text:style-name="T14">Fragmentation DoS 三手法：送 </text:span><text:span text:style-name="T5">（　　　</text:span><text:span text:style-name="T6">19</text:span><text:span text:style-name="T5">　　）</text:span><text:span text:style-name="T14">、送 </text:span><text:span text:style-name="T5">（　　　</text:span><text:span text:style-name="T6">20</text:span><text:span text:style-name="T5">　　）</text:span><text:span text:style-name="T14"> 的分段、送 </text:span><text:span text:style-name="T5">（　　　</text:span><text:soft-page-break/><text:span text:style-name="T6">21</text:span><text:span text:style-name="T5">　　）</text:span><text:span text:style-name="T14">；防禦：設重組 </text:span><text:span text:style-name="T5">（　　　</text:span><text:span text:style-name="T6">22</text:span><text:span text:style-name="T5">　　）</text:span><text:span text:style-name="T14">、丟棄異常分段、部署 IDS/Firewall。</text:span></text:p>
          </table:table-cell>
        </table:table-row>
      </table:table>
      <text:h text:style-name="P1" text:outline-level="1"><text:span text:style-name="T16">第 三 篇　IPv4 → IPv6 過渡技術</text:span></text:h>
      <text:p text:style-name="P2"><text:span text:style-name="T4">一、比較與五大特點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><text:span text:style-name="T12">🔄 <text:s/></text:span><text:span text:style-name="T17">比較填空</text:span></text:p>
            <text:p text:style-name="P13"><text:span text:style-name="T14">IPv4 位址 </text:span><text:span text:style-name="T5">（　　　</text:span><text:span text:style-name="T6">1</text:span><text:span text:style-name="T5">　　）</text:span><text:span text:style-name="T14"> bit（約 43 億，已不足）；IPv6 </text:span><text:span text:style-name="T5">（　　　</text:span><text:span text:style-name="T6">2</text:span><text:span text:style-name="T5">　　）</text:span><text:span text:style-name="T14"> bit。IPv4 需 NAT 而破壞 </text:span><text:span text:style-name="T5">（　　　</text:span><text:span text:style-name="T6">3</text:span><text:span text:style-name="T5">　　）</text:span><text:span text:style-name="T14">；IPv6 每裝置有獨立公開 IP。</text:span></text:p>
            <text:p text:style-name="P14"><text:span text:style-name="T14">IPv6 安全性支援 </text:span><text:span text:style-name="T5">（　　　</text:span><text:span text:style-name="T6">4</text:span><text:span text:style-name="T5">　　）</text:span><text:span text:style-name="T14">（RFC </text:span><text:span text:style-name="T5">（　　　</text:span><text:span text:style-name="T6">5</text:span><text:span text:style-name="T5">　　）</text:span><text:span text:style-name="T14"> 後由強制改為建議）；Header 固定 </text:span><text:span text:style-name="T5">（　　　</text:span><text:span text:style-name="T6">6</text:span><text:span text:style-name="T5">　　）</text:span><text:span text:style-name="T14"> bytes；用 </text:span><text:span text:style-name="T5">（　　　</text:span><text:span text:style-name="T6">7</text:span><text:span text:style-name="T5">　　）</text:span><text:span text:style-name="T14"> 支援 QoS；廣播改用 </text:span><text:span text:style-name="T5">（　　　</text:span><text:span text:style-name="T6">8</text:span><text:span text:style-name="T5">　　）</text:span><text:span text:style-name="T14">；自動配置用 </text:span><text:span text:style-name="T5">（　　　</text:span><text:span text:style-name="T6">9</text:span><text:span text:style-name="T5">　　）</text:span><text:span text:style-name="T14">。</text:span></text:p>
            <text:p text:style-name="P14"><text:span text:style-name="T14">五大特點口訣：大（128 bit）＋ </text:span><text:span text:style-name="T5">（　　　</text:span><text:span text:style-name="T6">10</text:span><text:span text:style-name="T5">　　）</text:span><text:span text:style-name="T14"> ＋ 快（固定 Header）＋ </text:span><text:span text:style-name="T5">（　　　</text:span><text:span text:style-name="T6">11</text:span><text:span text:style-name="T5">　　）</text:span><text:span text:style-name="T14"> ＋ 乾淨（無 Broadcast）。</text:span></text:p>
          </table:table-cell>
        </table:table-row>
      </table:table>
      <text:p text:style-name="P2"><text:span text:style-name="T4">二、三種過渡技術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><text:span text:style-name="T12">🌉 <text:s/></text:span><text:span text:style-name="T17">過渡技術填空</text:span></text:p>
            <text:p text:style-name="P13"><text:span text:style-name="T14">最常用、效能最好：</text:span><text:span text:style-name="T5">（　　　</text:span><text:span text:style-name="T6">12</text:span><text:span text:style-name="T5">　　）</text:span><text:span text:style-name="T14">；DNS 的 </text:span><text:span text:style-name="T5">（　　　</text:span><text:span text:style-name="T6">13</text:span><text:span text:style-name="T5">　　）</text:span><text:span text:style-name="T14"> record 回 IPv4、</text:span><text:span text:style-name="T5">（　　　</text:span><text:span text:style-name="T6">14</text:span><text:span text:style-name="T5">　　）</text:span><text:span text:style-name="T14"> record 回 IPv6，連線優先選 </text:span><text:span text:style-name="T5">（　　　</text:span><text:span text:style-name="T6">15</text:span><text:span text:style-name="T5">　　）</text:span><text:span text:style-name="T14">。</text:span></text:p>
            <text:p text:style-name="P14"><text:span text:style-name="T14">把 IPv6 封裝進 IPv4 外殼的是 </text:span><text:span text:style-name="T5">（　　　</text:span><text:span text:style-name="T6">16</text:span><text:span text:style-name="T5">　　）</text:span><text:span text:style-name="T14">（如 </text:span><text:span text:style-name="T5">（　　　</text:span><text:span text:style-name="T6">17</text:span><text:span text:style-name="T5">　　）</text:span><text:span text:style-name="T14">）；協定即時互轉的是 </text:span><text:span text:style-name="T5">（　　　</text:span><text:span text:style-name="T6">18</text:span><text:span text:style-name="T5">　　）</text:span><text:span text:style-name="T14">，代表技術 </text:span><text:span text:style-name="T5">（　　　</text:span><text:span text:style-name="T6">19</text:span><text:span text:style-name="T5">　　）</text:span><text:span text:style-name="T14">。</text:span></text:p>
            <text:p text:style-name="P14"><text:span text:style-name="T14">生活比喻：Dual Stack＝</text:span><text:span text:style-name="T5">（　　　</text:span><text:span text:style-name="T6">20</text:span><text:span text:style-name="T5">　　）</text:span><text:span text:style-name="T14">；Tunneling＝</text:span><text:span text:style-name="T5">（　　　</text:span><text:span text:style-name="T6">21</text:span><text:span text:style-name="T5">　　）</text:span><text:span text:style-name="T14">；Translation＝</text:span><text:span text:style-name="T5">（　　　</text:span><text:span text:style-name="T6">22</text:span><text:span text:style-name="T5">　　）</text:span><text:span text:style-name="T14">。</text:span></text:p>
          </table:table-cell>
        </table:table-row>
      </table:table>
      <text:h text:style-name="P1" text:outline-level="1"><text:span text:style-name="T16">第 四 篇　ARP、NAT 與完整上網流程</text:span></text:h>
      <text:p text:style-name="P2"><text:span text:style-name="T4">一、ARP 與 NAT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><text:span text:style-name="T12">🔗 <text:s/></text:span><text:span text:style-name="T17">ARP / NAT 填空</text:span></text:p>
            <text:p text:style-name="P13"><text:span text:style-name="T14">IP 位址像 </text:span><text:span text:style-name="T5">（　　　</text:span><text:span text:style-name="T6">1</text:span><text:span text:style-name="T5">　　）</text:span><text:span text:style-name="T14">（找最終目的地）；MAC 位址像 </text:span><text:span text:style-name="T5">（　　　</text:span><text:span text:style-name="T6">2</text:span><text:span text:style-name="T5">　　）</text:span><text:span text:style-name="T14">（決定下一站）。ARP ＝ 用 IP 找 </text:span><text:span text:style-name="T5">（　　　</text:span><text:span text:style-name="T6">3</text:span><text:span text:style-name="T5">　　）</text:span><text:span text:style-name="T14">，只在同一 </text:span><text:span text:style-name="T5">（　　　</text:span><text:span text:style-name="T6">4</text:span><text:span text:style-name="T5">　　）</text:span><text:span text:style-name="T14"> 內。</text:span></text:p>
            <text:p text:style-name="P14"><text:span text:style-name="T14">ARP 攻擊叫 </text:span><text:span text:style-name="T5">（　　　</text:span><text:span text:style-name="T6">5</text:span><text:span text:style-name="T5">　　）</text:span><text:span text:style-name="T14">，造成 </text:span><text:span text:style-name="T5">（　　　</text:span><text:span text:style-name="T6">6</text:span><text:span text:style-name="T5">　　）</text:span><text:span text:style-name="T14">；查 ARP 表的指令是 </text:span><text:span text:style-name="T5">（　　　</text:span><text:span text:style-name="T6">7</text:span><text:span text:style-name="T5">　　）</text:span><text:span text:style-name="T14">。</text:span></text:p>
            <text:p text:style-name="P14"><text:span text:style-name="T14">NAT ＝ 把 </text:span><text:span text:style-name="T5">（　　　</text:span><text:span text:style-name="T6">8</text:span><text:span text:style-name="T5">　　）</text:span><text:span text:style-name="T14"> 轉成 </text:span><text:span text:style-name="T5">（　　　</text:span><text:span text:style-name="T6">9</text:span><text:span text:style-name="T5">　　）</text:span><text:span text:style-name="T14">。三類型：一對一的 </text:span><text:span text:style-name="T5">（　　　</text:span><text:span text:style-name="T6">10</text:span><text:span text:style-name="T5">　　）</text:span><text:span text:style-name="T14">、對應 IP 池的 </text:span><text:span text:style-name="T5">（　　　</text:span><text:span text:style-name="T6">11</text:span><text:span text:style-name="T5">　　）</text:span><text:span text:style-name="T14">、多台共用一公網 IP 靠 Port 區分的 </text:span><text:span text:style-name="T5">（　　　</text:span><text:span text:style-name="T6">12</text:span><text:span text:style-name="T5">　　）</text:span><text:span text:style-name="T14">。</text:span></text:p>
            <text:p text:style-name="P14"><text:span text:style-name="T14">NAT 最大缺點是破壞 </text:span><text:span text:style-name="T5">（　　　</text:span><text:span text:style-name="T6">13</text:span><text:span text:style-name="T5">　　）</text:span><text:span text:style-name="T14"> 連線，使 </text:span><text:span text:style-name="T5">（　　　</text:span><text:span text:style-name="T6">14</text:span><text:span text:style-name="T5">　　）</text:span><text:span text:style-name="T14"> 直連受限，並增加 </text:span><text:span text:style-name="T5">（　　　</text:span><text:span text:style-name="T6">15</text:span><text:span text:style-name="T5">　　）</text:span><text:span text:style-name="T14">。</text:span></text:p>
            <text:p text:style-name="P14"><text:span text:style-name="T14">解決 NAT 限制三法：手動的 </text:span><text:span text:style-name="T5">（　　　</text:span><text:span text:style-name="T6">16</text:span><text:span text:style-name="T5">　　）</text:span><text:span text:style-name="T14">、自動但可能被惡意程式濫用的 </text:span><text:span text:style-name="T5">（　　　</text:span><text:span text:style-name="T6">17</text:span><text:span text:style-name="T5">　　）</text:span><text:span text:style-name="T14">、打洞的 </text:span><text:span text:style-name="T5">（　　　</text:span><text:span text:style-name="T6">18</text:span><text:span text:style-name="T5">　　）</text:span><text:span text:style-name="T14">；若兩端皆 </text:span><text:span text:style-name="T5">（　　　</text:span><text:span text:style-name="T6">19</text:span><text:span text:style-name="T5">　　）</text:span><text:span text:style-name="T14"> 則需改用 </text:span><text:span text:style-name="T5">（　　　</text:span><text:span text:style-name="T6">20</text:span><text:span text:style-name="T5">　　）</text:span><text:span text:style-name="T14"> 中繼。</text:span></text:p>
          </table:table-cell>
        </table:table-row>
      </table:table>
      <text:p text:style-name="P2"><text:span text:style-name="T4">二、完整上網流程與標準答案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><text:span text:style-name="T12">🎯 <text:s/></text:span><text:span text:style-name="T19">完整上網流程填空</text:span></text:p>
            <text:p text:style-name="P13"><text:span text:style-name="T14">核心觀念：</text:span><text:span text:style-name="T5">（　　　</text:span><text:span text:style-name="T6">1</text:span><text:span text:style-name="T5">　　）</text:span><text:span text:style-name="T14"> ＝ 最終目的地（全程不變）；</text:span><text:span text:style-name="T5">（　　　</text:span><text:span text:style-name="T6">2</text:span><text:span text:style-name="T5">　　）</text:span><text:span text:style-name="T14"> ＝ 下一站（每跳更換）。</text:span></text:p>
            <text:p text:style-name="P14"><text:span text:style-name="T14">流程：① </text:span><text:span text:style-name="T5">（　　　</text:span><text:span text:style-name="T6">3</text:span><text:span text:style-name="T5">　　）</text:span><text:span text:style-name="T14"> 解析網域為 IP → ② 用 ARP 取得 </text:span><text:span text:style-name="T5">（　　　</text:span><text:span text:style-name="T6">4</text:span><text:span text:style-name="T5">　　）</text:span><text:span text:style-name="T14"> 的 MAC → ③ 送 L2 封包 → ④ </text:span><text:span text:style-name="T5">（　　　</text:span><text:span text:style-name="T6">5</text:span><text:span text:style-name="T5">　　）</text:span><text:span text:style-name="T14"> 去程換公網 IP → ⑤ 到 Google → ⑥ 回應 → ⑦ NAT 回程換回 </text:span><text:span text:style-name="T5">（　　　</text:span><text:span text:style-name="T6">6</text:span><text:span text:style-name="T5">　　）</text:span><text:span text:style-name="T14"> → ⑧ 收到網頁。</text:span></text:p>
            <text:p text:style-name="P14"><text:span text:style-name="T14">三大地雷：ARP 找的是 </text:span><text:span text:style-name="T5">（　　　</text:span><text:span text:style-name="T6">7</text:span><text:span text:style-name="T5">　　）</text:span><text:span text:style-name="T14"> 的 MAC 不是 Google；封包先送到 </text:span><text:span text:style-name="T5">（　　　</text:span><text:span text:style-name="T6">8</text:span><text:span text:style-name="T5">　　）</text:span><text:span text:style-name="T14"> 再轉 Internet；傳輸中 IP 會被 </text:span><text:span text:style-name="T5">（　　　</text:span><text:span text:style-name="T6">9</text:span><text:span text:style-name="T5">　　）</text:span><text:span text:style-name="T14"> 在去程/回程更換。</text:span></text:p>
          </table:table-cell>
        </table:table-row>
      </table:table>
      <text:h text:style-name="P1" text:outline-level="1"><text:span text:style-name="T16">第 五 篇　TCP 傳輸控制深入</text:span></text:h>
      <text:p text:style-name="P2"><text:span text:style-name="T4">一、四麻煩、握手、SYN Flood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><text:span text:style-name="T12">🤝 <text:s/></text:span><text:span text:style-name="T17">握手填空</text:span></text:p>
            <text:p text:style-name="P13"><text:span text:style-name="T14">TCP 解決四麻煩：資料丟失→</text:span><text:span text:style-name="T5">（　　　</text:span><text:span text:style-name="T6">1</text:span><text:span text:style-name="T5">　　）</text:span><text:span text:style-name="T14">；順序亂掉→</text:span><text:span text:style-name="T5">（　　　</text:span><text:span text:style-name="T6">2</text:span><text:span text:style-name="T5">　　）</text:span><text:span text:style-name="T14">；對方來不及→</text:span><text:span text:style-name="T5">（　　　</text:span><text:span text:style-name="T6">3</text:span><text:span text:style-name="T5">　　）</text:span><text:span text:style-name="T14">；網路塞車→</text:span><text:span text:style-name="T5">（　　　</text:span><text:span text:style-name="T6">4</text:span><text:span text:style-name="T5">　　）</text:span><text:span text:style-name="T14">。</text:span></text:p>
            <text:p text:style-name="P14"><text:span text:style-name="T14">三次握手：</text:span><text:span text:style-name="T5">（　　　</text:span><text:span text:style-name="T6">5</text:span><text:span text:style-name="T5">　　）</text:span><text:span text:style-name="T14"> → </text:span><text:span text:style-name="T5">（　　　</text:span><text:span text:style-name="T6">6</text:span><text:span text:style-name="T5">　　）</text:span><text:span text:style-name="T14"> → </text:span><text:span text:style-name="T5">（　　　</text:span><text:span text:style-name="T6">7</text:span><text:span text:style-name="T5">　　）</text:span><text:span text:style-name="T14">；目的是確認 </text:span><text:span text:style-name="T5">（　　　</text:span><text:span text:style-name="T6">8</text:span><text:span text:style-name="T5">　　）</text:span><text:span text:style-name="T14"> 並避免舊封包誤觸發新連線。</text:span></text:p>
            <text:p text:style-name="P14"><text:span text:style-name="T14">SYN Flood：大量送 SYN 卻不回 ACK，製造 </text:span><text:span text:style-name="T5">（　　　</text:span><text:span text:style-name="T6">9</text:span><text:span text:style-name="T5">　　）</text:span><text:span text:style-name="T14"> 耗盡伺服器資源，本質是 </text:span><text:span text:style-name="T5">（　　　</text:span><text:span text:style-name="T6">10</text:span><text:span text:style-name="T5">　　）</text:span><text:span text:style-name="T14"> 攻擊。</text:span></text:p>
          </table:table-cell>
        </table:table-row>
      </table:table>
      <text:p text:style-name="P2"><text:span text:style-name="T4">二、rwnd/cwnd、滑動視窗、擁塞控制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><text:span text:style-name="T12">🚦 <text:s/></text:span><text:span text:style-name="T17">擁塞控制填空</text:span></text:p>
            <text:p text:style-name="P13"><text:span text:style-name="T14">實際傳送量 ＝ </text:span><text:span text:style-name="T5">（　　　</text:span><text:span text:style-name="T6">1</text:span><text:span text:style-name="T5">　　）</text:span><text:span text:style-name="T14">；rwnd 是 </text:span><text:span text:style-name="T5">（　　　</text:span><text:span text:style-name="T6">2</text:span><text:span text:style-name="T5">　　）</text:span><text:span text:style-name="T14"> 限制、cwnd 是 </text:span><text:span text:style-name="T5">（　　　</text:span><text:span text:style-name="T6">3</text:span><text:span text:style-name="T5">　　）</text:span><text:span text:style-name="T14"> 限制。滑動視窗讓多個封包同時在網路上飛，稱 </text:span><text:span text:style-name="T5">（　　　</text:span><text:span text:style-name="T6">4</text:span><text:span text:style-name="T5">　　）</text:span><text:span text:style-name="T14">。</text:span></text:p>
            <text:p text:style-name="P14"><text:span text:style-name="T14">Slow Start：每收一個 ACK，cwnd </text:span><text:span text:style-name="T5">（　　　</text:span><text:span text:style-name="T6">5</text:span><text:span text:style-name="T5">　　）</text:span><text:span text:style-name="T14">，呈 </text:span><text:span text:style-name="T5">（　　　</text:span><text:span text:style-name="T6">6</text:span><text:span text:style-name="T5">　　）</text:span><text:span text:style-name="T14"> 成長；到門檻 </text:span><text:span text:style-name="T5">（　　　</text:span><text:span text:style-name="T6">7</text:span><text:span text:style-name="T5">　　）</text:span><text:span text:style-name="T14"> 後改 Congestion Avoidance，每 RTT +1 呈 </text:span><text:span text:style-name="T5">（　　　</text:span><text:span text:style-name="T6">8</text:span><text:span text:style-name="T5">　　）</text:span><text:span text:style-name="T14"> 成長。</text:span></text:p>
            <text:p text:style-name="P14"><text:span text:style-name="T14">丟包處理：Timeout（嚴重擁塞）→ ssthresh＝cwnd/2、cwnd 重設為 </text:span><text:span text:style-name="T5">（　　　</text:span><text:span text:style-name="T6">9</text:span><text:span text:style-name="T5">　　）</text:span><text:span text:style-name="T14"> 回 Slow Start；收到 3 個重複 ACK → cwnd </text:span><text:span text:style-name="T5">（　　　</text:span><text:span text:style-name="T6">10</text:span><text:span text:style-name="T5">　　）</text:span><text:span text:style-name="T14"> 續 CA。</text:span></text:p>
            <text:p text:style-name="P14"><text:span text:style-name="T14">AIMD：沒丟包每 RTT </text:span><text:span text:style-name="T5">（　　　</text:span><text:span text:style-name="T6">11</text:span><text:span text:style-name="T5">　　）</text:span><text:span text:style-name="T14">；丟包則 ×</text:span><text:span text:style-name="T5">（　　　</text:span><text:span text:style-name="T6">12</text:span><text:span text:style-name="T5">　　）</text:span><text:span text:style-name="T14">。RTT 指 </text:span><text:span text:style-name="T5">（　　　</text:span><text:span text:style-name="T6">13</text:span><text:span text:style-name="T5">　　）</text:span><text:span text:style-name="T14">。</text:span></text:p>
          </table:table-cell>
        </table:table-row>
      </table:table>
      <text:h text:style-name="P1" text:outline-level="1"><text:span text:style-name="T16">第 六 篇　DNS 與 DNSSEC</text:span></text:h>
      <text:p text:style-name="P2"><text:span text:style-name="T4">一、資源紀錄與查詢流程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0"><text:span text:style-name="T12">📚 <text:s/></text:span><text:span text:style-name="T17">DNS 基礎填空</text:span></text:p>
            <text:p text:style-name="P13"><text:span text:style-name="T14">DNS ＝ 把 </text:span><text:span text:style-name="T5">（　　　</text:span><text:span text:style-name="T6">1</text:span><text:span text:style-name="T5">　　）</text:span><text:span text:style-name="T14"> 轉換為 </text:span><text:span text:style-name="T5">（　　　</text:span><text:span text:style-name="T6">2</text:span><text:span text:style-name="T5">　　）</text:span><text:span text:style-name="T14"> 的分散式系統。資源紀錄：A→IPv4、NS→</text:span><text:span text:style-name="T5">（　　　</text:span><text:span text:style-name="T6">3</text:span><text:span text:style-name="T5">　　）</text:span><text:span text:style-name="T14">、MX→</text:span><text:span text:style-name="T5">（　　　</text:span><text:span text:style-name="T6">4</text:span><text:span text:style-name="T5">　　）</text:span><text:span text:style-name="T14">、CNAME→</text:span><text:span text:style-name="T5">（　　　</text:span><text:span text:style-name="T6">5</text:span><text:span text:style-name="T5">　　）</text:span><text:span text:style-name="T14">。</text:span></text:p>
            <text:p text:style-name="P14"><text:span text:style-name="T14">查詢流程：</text:span><text:span text:style-name="T5">（　　　</text:span><text:span text:style-name="T6">6</text:span><text:span text:style-name="T5">　　）</text:span><text:span text:style-name="T14"> → Local → </text:span><text:span text:style-name="T5">（　　　</text:span><text:span text:style-name="T6">7</text:span><text:span text:style-name="T5">　　）</text:span><text:span text:style-name="T14"> → </text:span><text:span text:style-name="T5">（　　　</text:span><text:span text:style-name="T6">8</text:span><text:span text:style-name="T5">　　）</text:span><text:span text:style-name="T14"> → </text:span><text:span text:style-name="T5">（　　　</text:span><text:span text:style-name="T6">9</text:span><text:span text:style-name="T5">　　）</text:span><text:span text:style-name="T14"> → 取得 IP。全球 Root DNS 共 </text:span><text:span text:style-name="T5">（　　　</text:span><text:span text:style-name="T6">10</text:span><text:span text:style-name="T5">　　）</text:span><text:span text:style-name="T14"> 組。</text:span></text:p>
          </table:table-cell>
        </table:table-row>
      </table:table>
      <text:p text:style-name="P2"><text:span text:style-name="T4">二、Recursive/Iterative、Open Resolver、DNSSEC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0"><text:span text:style-name="T12">🔐 <text:s/></text:span><text:span text:style-name="T17">查詢方式與安全填空</text:span></text:p>
            <text:p text:style-name="P13"><text:span text:style-name="T14">DNS 幫你問到底叫 </text:span><text:span text:style-name="T5">（　　　</text:span><text:span text:style-name="T6">11</text:span><text:span text:style-name="T5">　　）</text:span><text:span text:style-name="T14">（口訣代查到底，一般使用者→Local DNS 採此）；你自己逐層問叫 </text:span><text:span text:style-name="T5">（　　　</text:span><text:span text:style-name="T6">12</text:span><text:span text:style-name="T5">　　）</text:span><text:span text:style-name="T14">（口訣逐層詢問，DNS 伺服器之間採此）。</text:span></text:p>
            <text:p text:style-name="P14"><text:span text:style-name="T14">Open Resolver 兩大風險：偽造回應植入假 IP 的 </text:span><text:span text:style-name="T5">（　　　</text:span><text:span text:style-name="T6">13</text:span><text:span text:style-name="T5">　　）</text:span><text:span text:style-name="T14">；偽造受害者 IP 灌爆流量的 </text:span><text:span text:style-name="T5">（　　　</text:span><text:span text:style-name="T6">14</text:span><text:span text:style-name="T5">　　）</text:span><text:span text:style-name="T14">。</text:span></text:p>
            <text:p text:style-name="P14"><text:span text:style-name="T14">DNSSEC 用 </text:span><text:span text:style-name="T5">（　　　</text:span><text:span text:style-name="T6">15</text:span><text:span text:style-name="T5">　　）</text:span><text:span text:style-name="T14"> 驗證回應真偽，可防 DNS Spoofing 與 Cache Poisoning；但它 </text:span><text:span text:style-name="T5">（　　　</text:span><text:span text:style-name="T6">16</text:span><text:span text:style-name="T5">　　）</text:span><text:span text:style-name="T14">，也無法防 </text:span><text:span text:style-name="T5">（　　　</text:span><text:span text:style-name="T6">17</text:span><text:span text:style-name="T5">　　）</text:span><text:span text:style-name="T14">。</text:span></text:p>
          </table:table-cell>
        </table:table-row>
      </table:table>
      <text:h text:style-name="P1" text:outline-level="1"><text:span text:style-name="T16">第 七 篇　路由協定 OSPF / BGP</text:span></text:h>
      <text:p text:style-name="P2"><text:span text:style-name="T4">一、IGP/EGP 與 OSPF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0"><text:span text:style-name="T12">🗺️ <text:s/></text:span><text:span text:style-name="T17">OSPF 填空</text:span></text:p>
            <text:p text:style-name="P13"><text:span text:style-name="T14">組織內部用 </text:span><text:span text:style-name="T5">（　　　</text:span><text:span text:style-name="T6">1</text:span><text:span text:style-name="T5">　　）</text:span><text:span text:style-name="T14">（OSPF、RIP）；不同組織之間用 </text:span><text:span text:style-name="T5">（　　　</text:span><text:span text:style-name="T6">2</text:span><text:span text:style-name="T5">　　）</text:span><text:span text:style-name="T14">（即 BGP）。OSPF 規定所有 Area 必須連到 </text:span><text:span text:style-name="T5">（　　　</text:span><text:span text:style-name="T6">3</text:span><text:span text:style-name="T5">　　）</text:span><text:span text:style-name="T14">（骨幹）。</text:span></text:p>
            <text:p text:style-name="P14"><text:span text:style-name="T14">OSPF 四種 Router：只在區內的 </text:span><text:span text:style-name="T5">（　　　</text:span><text:span text:style-name="T6">4</text:span><text:span text:style-name="T5">　　）</text:span><text:span text:style-name="T14">、在 Area 0 的 </text:span><text:span text:style-name="T5">（　　　</text:span><text:span text:style-name="T6">5</text:span><text:span text:style-name="T5">　　）</text:span><text:span text:style-name="T14">、跨 Area 橋樑的 </text:span><text:span text:style-name="T5">（　　　</text:span><text:span text:style-name="T6">6</text:span><text:span text:style-name="T5">　　）</text:span><text:span text:style-name="T14">、把外部路由帶進 OSPF 的跨 AS 入口 </text:span><text:span text:style-name="T5">（　　　</text:span><text:span text:style-name="T6">7</text:span><text:span text:style-name="T5">　　）</text:span><text:span text:style-name="T14">。</text:span></text:p>
          </table:table-cell>
        </table:table-row>
      </table:table>
      <text:p text:style-name="P2"><text:span text:style-name="T4">二、AS-PATH 與 BGP 選路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0"><text:span text:style-name="T12">🧭 <text:s/></text:span><text:span text:style-name="T17">BGP 填空</text:span></text:p>
            <text:p text:style-name="P13"><text:span text:style-name="T14">AS-PATH 是路徑的「</text:span><text:span text:style-name="T5">（　　　</text:span><text:span text:style-name="T6">8</text:span><text:span text:style-name="T5">　　）</text:span><text:span text:style-name="T14">」，不是實際路由本身。</text:span></text:p>
            <text:p text:style-name="P14"><text:span text:style-name="T14">BGP 九步選路（前面贏就停）：</text:span><text:span text:style-name="T5">（　　　</text:span><text:span text:style-name="T6">9</text:span><text:span text:style-name="T5">　　）</text:span><text:span text:style-name="T14">（Cisco 私有）&gt; </text:span><text:span text:style-name="T5">（　　　</text:span><text:span text:style-name="T6">10</text:span><text:span text:style-name="T5">　　）</text:span><text:span text:style-name="T14"> &gt; 本地產生 &gt; </text:span><text:span text:style-name="T5">（　　　</text:span><text:span text:style-name="T6">11</text:span><text:span text:style-name="T5">　　）</text:span><text:span text:style-name="T14"> &gt; Origin &gt; </text:span><text:span text:style-name="T5">（　　　</text:span><text:span text:style-name="T6">12</text:span><text:span text:style-name="T5">　　）</text:span><text:span text:style-name="T14"> &gt; eBGP &gt; IGP cost &gt; </text:span><text:span text:style-name="T5">（　　　</text:span><text:span text:style-name="T6">13</text:span><text:span text:style-name="T5">　　）</text:span><text:span text:style-name="T14">。</text:span></text:p>
            <text:p text:style-name="P14"><text:span text:style-name="T14">BGP 本質是 </text:span><text:span text:style-name="T5">（　　　</text:span><text:span text:style-name="T6">14</text:span><text:span text:style-name="T5">　　）</text:span><text:span text:style-name="T14"> 導向（不是距離導向）；最重要的「通用」屬性是 </text:span><text:span text:style-name="T5">（　　　</text:span><text:span text:style-name="T6">15</text:span><text:span text:style-name="T5">　　）</text:span><text:span text:style-name="T14">。</text:span></text:p>
            <text:p text:style-name="P14"><text:span text:style-name="T14">三層分工：防火牆決定 </text:span><text:span text:style-name="T5">（　　　</text:span><text:span text:style-name="T6">16</text:span><text:span text:style-name="T5">　　）</text:span><text:span text:style-name="T14">、NAT 解決 </text:span><text:span text:style-name="T5">（　　　</text:span><text:span text:style-name="T6">17</text:span><text:span text:style-name="T5">　　）</text:span><text:span text:style-name="T14">、BGP 決定 </text:span><text:span text:style-name="T5">（　　　</text:span><text:span text:style-name="T6">18</text:span><text:span text:style-name="T5">　　）</text:span><text:span text:style-name="T14">。</text:span></text:p>
            <text:p text:style-name="P14"><text:span text:style-name="T14">陷阱更正：MED 只能比較來自 </text:span><text:span text:style-name="T5">（　　　</text:span><text:span text:style-name="T6">19</text:span><text:span text:style-name="T5">　　）</text:span><text:span text:style-name="T14"> 的路由；eBGP 優先於 </text:span><text:span text:style-name="T5">（　　　</text:span><text:span text:style-name="T6">20</text:span><text:span text:style-name="T5">　　）</text:span><text:span text:style-name="T14">；算最短路徑的是 </text:span><text:span text:style-name="T5">（　　　</text:span><text:span text:style-name="T6">21</text:span><text:span text:style-name="T5">　　）</text:span><text:span text:style-name="T14">（不是 BGP）。</text:span></text:p>
          </table:table-cell>
        </table:table-row>
      </table:table>
      <text:h text:style-name="P1" text:outline-level="1"><text:span text:style-name="T16">第 八 篇　網路系統進階 SDN / LB / CDN / 5G</text:span></text:h>
      <text:p text:style-name="P2"><text:span text:style-name="T4">一、SDN 與 Load Balancing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0"><text:span text:style-name="T12">🟦 <text:s/></text:span><text:span text:style-name="T17">SDN / LB 填空</text:span></text:p>
            <text:p text:style-name="P13"><text:span text:style-name="T14">SDN 把 </text:span><text:span text:style-name="T5">（　　　</text:span><text:span text:style-name="T6">1</text:span><text:span text:style-name="T5">　　）</text:span><text:span text:style-name="T14"> 與 </text:span><text:span text:style-name="T5">（　　　</text:span><text:span text:style-name="T6">2</text:span><text:span text:style-name="T5">　　）</text:span><text:span text:style-name="T14"> 分離；三層為 Application → </text:span><text:span text:style-name="T5">（　　　</text:span><text:span text:style-name="T6">3</text:span><text:span text:style-name="T5">　　）</text:span><text:span text:style-name="T14"> → Infrastructure。Router 負責 </text:span><text:span text:style-name="T5">（　　　</text:span><text:span text:style-name="T6">4</text:span><text:span text:style-name="T5">　　）</text:span><text:span text:style-name="T14"> 傳資料、Switch 負責 </text:span><text:span text:style-name="T5">（　　　</text:span><text:span text:style-name="T6">5</text:span><text:span text:style-name="T5">　　）</text:span><text:span text:style-name="T14"> 傳資料。</text:span></text:p>
            <text:p text:style-name="P14"><text:span text:style-name="T14">負載平衡「輪、重、黏」：輪＝</text:span><text:span text:style-name="T5">（　　　</text:span><text:span text:style-name="T6">6</text:span><text:span text:style-name="T5">　　）</text:span><text:span text:style-name="T14">（不看效能）、重＝</text:span><text:span text:style-name="T5">（　　　</text:span><text:span text:style-name="T6">7</text:span><text:span text:style-name="T5">　　）</text:span><text:span text:style-name="T14">（依權重）、黏＝</text:span><text:span text:style-name="T5">（　　　</text:span><text:span text:style-name="T6">8</text:span><text:span text:style-name="T5">　　）</text:span><text:span text:style-name="T14">（同人同台）。</text:span></text:p>
          </table:table-cell>
        </table:table-row>
      </table:table>
      <text:p text:style-name="P2"><text:span text:style-name="T4">二、CDN 與 5G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0"><text:span text:style-name="T12">🌍 <text:s/></text:span><text:span text:style-name="T17">CDN / 5G 填空</text:span></text:p>
            <text:p text:style-name="P13"><text:span text:style-name="T14">CDN 靠 DNS 的 </text:span><text:span text:style-name="T5">（　　　</text:span><text:span text:style-name="T6">9</text:span><text:span text:style-name="T5">　　）</text:span><text:span text:style-name="T14"> 記錄（網址→</text:span><text:span text:style-name="T5">（　　　</text:span><text:span text:style-name="T6">10</text:span><text:span text:style-name="T5">　　）</text:span><text:span text:style-name="T14">）導向最近的 </text:span><text:span text:style-name="T5">（　　　</text:span><text:span text:style-name="T6">11</text:span><text:span text:style-name="T5">　　）</text:span><text:span text:style-name="T14"> 伺服器就近回應。</text:span></text:p>
            <text:p text:style-name="P14"><text:span text:style-name="T14">5G「快低多切」：快＝</text:span><text:span text:style-name="T5">（　　　</text:span><text:span text:style-name="T6">12</text:span><text:span text:style-name="T5">　　）</text:span><text:span text:style-name="T14">（高速）、低＝</text:span><text:span text:style-name="T5">（　　　</text:span><text:span text:style-name="T6">13</text:span><text:span text:style-name="T5">　　）</text:span><text:span text:style-name="T14">（超低延遲）、多＝</text:span><text:span text:style-name="T5">（　　　</text:span><text:span text:style-name="T6">14</text:span><text:span text:style-name="T5">　　）</text:span><text:span text:style-name="T14">（大量連線）、切＝</text:span><text:span text:style-name="T5">（　　　</text:span><text:span text:style-name="T6">15</text:span><text:span text:style-name="T5">　　）</text:span><text:span text:style-name="T14">（網路切片）。</text:span></text:p>
          </table:table-cell>
        </table:table-row>
      </table:table>
      <text:h text:style-name="P1" text:outline-level="1"><text:span text:style-name="T16">第 九 篇　無線通訊 WiFi vs Bluetooth</text:span></text:h>
      <text:p text:style-name="P2"><text:span text:style-name="T4">一、存取機制與抗干擾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"><text:span text:style-name="T12">📶 <text:s/></text:span><text:span text:style-name="T17">機制填空</text:span></text:p>
            <text:p text:style-name="P13"><text:span text:style-name="T14">WiFi 用 </text:span><text:span text:style-name="T5">（　　　</text:span><text:span text:style-name="T6">1</text:span><text:span text:style-name="T5">　　）</text:span><text:span text:style-name="T14"> 來「避免」碰撞；有線乙太網路用 </text:span><text:span text:style-name="T5">（　　　</text:span><text:span text:style-name="T6">2</text:span><text:span text:style-name="T5">　　）</text:span><text:span text:style-name="T14"> 來「偵測」碰撞。WiFi 高速基礎技術是 </text:span><text:span text:style-name="T5">（　　　</text:span><text:span text:style-name="T6">3</text:span><text:span text:style-name="T5">　　）</text:span><text:span text:style-name="T14">。</text:span></text:p>
            <text:p text:style-name="P14"><text:span text:style-name="T14">Bluetooth 不靠搶，由 </text:span><text:span text:style-name="T5">（　　　</text:span><text:span text:style-name="T6">4</text:span><text:span text:style-name="T5">　　）</text:span><text:span text:style-name="T14"> 統一排班、Slave 照順序；抗干擾用跳頻技術 </text:span><text:span text:style-name="T5">（　　　</text:span><text:span text:style-name="T6">5</text:span><text:span text:style-name="T5">　　）</text:span><text:span text:style-name="T14">（每秒約 </text:span><text:span text:style-name="T5">（　　　</text:span><text:span text:style-name="T6">6</text:span><text:span text:style-name="T5">　　）</text:span><text:span text:style-name="T14"> 次）。</text:span></text:p>
          </table:table-cell>
        </table:table-row>
      </table:table>
      <text:p text:style-name="P2"><text:span text:style-name="T4">二、QoS、語音、時槽、L2CAP</text:span>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0"><text:span text:style-name="T12">🔵 <text:s/></text:span><text:span text:style-name="T17">QoS 與 L2CAP 填空</text:span></text:p>
            <text:p text:style-name="P13"><text:span text:style-name="T14">WiFi 的 QoS 機制是 </text:span><text:span text:style-name="T5">（　　　</text:span><text:span text:style-name="T6">7</text:span><text:span text:style-name="T5">　　）</text:span><text:span text:style-name="T14">（急診室分級）；藍牙即時語音用 </text:span><text:span text:style-name="T5">（　　　</text:span><text:span text:style-name="T6">8</text:span><text:span text:style-name="T5">　　）</text:span><text:span text:style-name="T14"> 或加強可重傳的 </text:span><text:span text:style-name="T5">（　　　</text:span><text:span text:style-name="T6">9</text:span><text:span text:style-name="T5">　　）</text:span><text:span text:style-name="T14">。</text:span></text:p>
            <text:p text:style-name="P14"><text:span text:style-name="T14">把時間切成固定小格子依序使用的機制叫 </text:span><text:span text:style-name="T5">（　　　</text:span><text:span text:style-name="T6">10</text:span><text:span text:style-name="T5">　　）</text:span><text:span text:style-name="T14">，好處是穩定不碰撞、即時性保證與 </text:span><text:span text:style-name="T5">（　　　</text:span><text:span text:style-name="T6">11</text:span><text:span text:style-name="T5">　　）</text:span><text:span text:style-name="T14">。</text:span></text:p>
            <text:p text:style-name="P14"><text:span text:style-name="T14">L2CAP 是藍牙的資料管理員，主要位於 </text:span><text:span text:style-name="T5">（　　　</text:span><text:span text:style-name="T6">12</text:span><text:span text:style-name="T5">　　）</text:span><text:span text:style-name="T14">；三種邏輯通道：可靠的 </text:span><text:span text:style-name="T5">（　　　</text:span><text:span text:style-name="T6">13</text:span><text:span text:style-name="T5">　　）</text:span><text:span text:style-name="T14">、快速的 </text:span><text:span text:style-name="T5">（　　　</text:span><text:span text:style-name="T6">14</text:span><text:span text:style-name="T5">　　）</text:span><text:span text:style-name="T14">、控制管理用的 </text:span><text:span text:style-name="T5">（　　　</text:span><text:span text:style-name="T6">15</text:span><text:span text:style-name="T5">　　）</text:span><text:span text:style-name="T14">。</text:span></text:p>
          </table:table-cell>
        </table:table-row>
      </table:table>
      <text:h text:style-name="P1" text:outline-level="1"><text:span text:style-name="T16">第 十 篇　資訊安全</text:span></text:h>
      <text:p text:style-name="P2"><text:span text:style-name="T4">壹、防護設備 FW/WAF/NGFW/DMZ/IOC/Proxy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0"><text:span text:style-name="T12">🛡️ <text:s/></text:span><text:span text:style-name="T17">設備填空</text:span></text:p>
            <text:p text:style-name="P13"><text:span text:style-name="T14">FW 只看封包外部（IP/Port），屬 </text:span><text:span text:style-name="T5">（　　　</text:span><text:span text:style-name="T6">1</text:span><text:span text:style-name="T5">　　）</text:span><text:span text:style-name="T14">；WAF 檢查封包內容、防 SQLi 與 </text:span><text:span text:style-name="T5">（　　　</text:span><text:span text:style-name="T6">2</text:span><text:span text:style-name="T5">　　）</text:span><text:span text:style-name="T14">，屬 </text:span><text:span text:style-name="T5">（　　　</text:span><text:span text:style-name="T6">3</text:span><text:span text:style-name="T5">　　）</text:span><text:span text:style-name="T14">；NGFW 具 </text:span><text:span text:style-name="T5">（　　　</text:span><text:span text:style-name="T6">4</text:span><text:span text:style-name="T5">　　）</text:span><text:span text:style-name="T14">、IPS、App 識別。</text:span></text:p>
            <text:p text:style-name="P14"><text:span text:style-name="T14">把對外服務（Web/Mail/DNS）隔離、被駭也不傷內部的區域叫 </text:span><text:span text:style-name="T5">（　　　</text:span><text:span text:style-name="T6">5</text:span><text:span text:style-name="T5">　　）</text:span><text:span text:style-name="T14">。</text:span></text:p>
            <text:p text:style-name="P14"><text:span text:style-name="T14">IOC 四線索「網檔連控」：網＝</text:span><text:span text:style-name="T5">（　　　</text:span><text:span text:style-name="T6">6</text:span><text:span text:style-name="T5">　　）</text:span><text:span text:style-name="T14">、檔＝</text:span><text:span text:style-name="T5">（　　　</text:span><text:span text:style-name="T6">7</text:span><text:span text:style-name="T5">　　）</text:span><text:span text:style-name="T14">、連＝</text:span><text:span text:style-name="T5">（　　　</text:span><text:span text:style-name="T6">8</text:span><text:span text:style-name="T5">　　）</text:span><text:span text:style-name="T14">、控＝</text:span><text:span text:style-name="T5">（　　　</text:span><text:span text:style-name="T6">9</text:span><text:span text:style-name="T5">　　）</text:span><text:span text:style-name="T14">；IOC 是攻擊的「</text:span><text:span text:style-name="T5">（　　　</text:span><text:span text:style-name="T6">10</text:span><text:span text:style-name="T5">　　）</text:span><text:span text:style-name="T14">」，不能用來預測攻擊。</text:span></text:p>
            <text:p text:style-name="P14"><text:span text:style-name="T14">幫使用者隱藏 IP 的是 </text:span><text:span text:style-name="T5">（　　　</text:span><text:span text:style-name="T6">11</text:span><text:span text:style-name="T5">　　）</text:span><text:span text:style-name="T14">；幫伺服器負載平衡/隱藏後端的是 </text:span><text:span text:style-name="T5">（　　　</text:span><text:span text:style-name="T6">12</text:span><text:span text:style-name="T5">　　）</text:span><text:span text:style-name="T14">。</text:span></text:p>
            <text:p text:style-name="P14"><text:span text:style-name="T14">封包闖關順序：Client → Proxy → Internet → </text:span><text:span text:style-name="T5">（　　　</text:span><text:span text:style-name="T6">13</text:span><text:span text:style-name="T5">　　）</text:span><text:span text:style-name="T14"> → </text:span><text:span text:style-name="T5">（　　　</text:span><text:span text:style-name="T6">14</text:span><text:span text:style-name="T5">　　）</text:span><text:span text:style-name="T14"> → </text:span><text:span text:style-name="T5">（　　　</text:span><text:span text:style-name="T6">15</text:span><text:span text:style-name="T5">　　）</text:span><text:span text:style-name="T14"> → Reverse Proxy → 內部 Server。</text:span></text:p>
          </table:table-cell>
        </table:table-row>
      </table:table>
      <text:p text:style-name="P2"><text:span text:style-name="T4">貳、SQL Injection 與 Zero-Day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0"><text:span text:style-name="T12">💉 <text:s/></text:span><text:span text:style-name="T17">攻防填空</text:span></text:p>
            <text:p text:style-name="P13"><text:span text:style-name="T14">SQL Injection 的本質：把原本只是「資料」的輸入，惡意改造成可執行的「</text:span><text:span text:style-name="T5">（　　　</text:span><text:span text:style-name="T6">1</text:span><text:span text:style-name="T5">　　）</text:span><text:span text:style-name="T14">」。經典攻擊字串 </text:span><text:span text:style-name="T5">（　　　</text:span><text:span text:style-name="T6">2</text:span><text:span text:style-name="T5">　　）</text:span><text:span text:style-name="T14">，其中 OR 1=1 </text:span><text:span text:style-name="T5">（　　　</text:span><text:span text:style-name="T6">3</text:span><text:span text:style-name="T5">　　）</text:span><text:span text:style-name="T14">（查出全部），-- 是 </text:span><text:span text:style-name="T5">（　　　</text:span><text:span text:style-name="T6">4</text:span><text:span text:style-name="T5">　　）</text:span><text:span text:style-name="T14">。</text:span></text:p>
            <text:p text:style-name="P14"><text:span text:style-name="T14">根本防禦是 </text:span><text:span text:style-name="T5">（　　　</text:span><text:span text:style-name="T6">5</text:span><text:span text:style-name="T5">　　）</text:span><text:span text:style-name="T14">，用 </text:span><text:span text:style-name="T5">（　　　</text:span><text:span text:style-name="T6">6</text:span><text:span text:style-name="T5">　　）</text:span><text:span text:style-name="T14"> 把資料與 SQL 結構分離；其他輔助：輸入驗證、</text:span><text:span text:style-name="T5">（　　　</text:span><text:span text:style-name="T6">7</text:span><text:span text:style-name="T5">　　）</text:span><text:span text:style-name="T14">、</text:span><text:span text:style-name="T5">（　　　</text:span><text:span text:style-name="T6">8</text:span><text:span text:style-name="T5">　　）</text:span><text:span text:style-name="T14">。</text:span></text:p>
            <text:p text:style-name="P14"><text:span text:style-name="T14">Zero-Day 指尚未被發現/修補的漏洞，廠商只有 </text:span><text:span text:style-name="T5">（　　　</text:span><text:span text:style-name="T6">9</text:span><text:span text:style-name="T5">　　）</text:span><text:span text:style-name="T14"> 天可應對；傳統防毒因沒有 </text:span><text:span text:style-name="T5">（　　　</text:span><text:span text:style-name="T6">10</text:span><text:span text:style-name="T5">　　）</text:span><text:span text:style-name="T14"> 而失效。</text:span></text:p>
            <text:p text:style-name="P14"><text:span text:style-name="T14">Zero-Day 防禦：立即套用 </text:span><text:span text:style-name="T5">（　　　</text:span><text:span text:style-name="T6">11</text:span><text:span text:style-name="T5">　　）</text:span><text:span text:style-name="T14">、用 </text:span><text:span text:style-name="T5">（　　　</text:span><text:span text:style-name="T6">12</text:span><text:span text:style-name="T5">　　）</text:span><text:span text:style-name="T14"> 偵測攔截、DPI 深度檢查、</text:span><text:span text:style-name="T5">（　　　</text:span><text:span text:style-name="T6">13</text:span><text:span text:style-name="T5">　　）</text:span><text:span text:style-name="T14"> 與最小權限。</text:span></text:p>
          </table:table-cell>
        </table:table-row>
      </table:table>
      <text:p text:style-name="P2"><text:span text:style-name="T4">參、Firewall / IDS / IPS / SNMP / ICMP</text:span>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0"><text:span text:style-name="T12">👀 <text:s/></text:span><text:span text:style-name="T19">偵測填空</text:span></text:p>
            <text:p text:style-name="P13"><text:span text:style-name="T14">三防分工：Firewall 擋入口、IDS </text:span><text:span text:style-name="T5">（　　　</text:span><text:span text:style-name="T6">1</text:span><text:span text:style-name="T5">　　）</text:span><text:span text:style-name="T14">、IPS 偵測 ＋ </text:span><text:span text:style-name="T5">（　　　</text:span><text:span text:style-name="T6">2</text:span><text:span text:style-name="T5">　　）</text:span><text:span text:style-name="T14">。HIDS 看主機 </text:span><text:span text:style-name="T5">（　　　</text:span><text:span text:style-name="T6">3</text:span><text:span text:style-name="T5">　　）</text:span><text:span text:style-name="T14">、NIDS 看網路 </text:span><text:span text:style-name="T5">（　　　</text:span><text:span text:style-name="T6">4</text:span><text:span text:style-name="T5">　　）</text:span><text:span text:style-name="T14">。</text:span></text:p>
            <text:p text:style-name="P14"><text:span text:style-name="T14">易混兩協定：</text:span><text:span text:style-name="T5">（　　　</text:span><text:span text:style-name="T6">5</text:span><text:span text:style-name="T5">　　）</text:span><text:span text:style-name="T14"> 管理設備（屬 </text:span><text:span text:style-name="T5">（　　　</text:span><text:span text:style-name="T6">6</text:span><text:span text:style-name="T5">　　）</text:span><text:span text:style-name="T14">／UDP）；</text:span><text:span text:style-name="T5">（　　　</text:span><text:span text:style-name="T6">7</text:span><text:span text:style-name="T5">　　）</text:span><text:span text:style-name="T14"> 診斷網路（屬 </text:span><text:span text:style-name="T5">（　　　</text:span><text:span text:style-name="T6">8</text:span><text:span text:style-name="T5">　　）</text:span><text:span text:style-name="T14">，如 Ping）。</text:span></text:p>
          </table:table-cell>
        </table:table-row>
      </table:table>
      <text:p text:style-name="P2"><text:span text:style-name="T4">肆、企業資安：預防/偵測/復原、SSDLC、ISO 27001</text:span>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0"><text:span text:style-name="T12">🏢 <text:s/></text:span><text:span text:style-name="T17">企業資安填空</text:span></text:p>
            <text:p text:style-name="P13"><text:span text:style-name="T14">企業資安三階段：</text:span><text:span text:style-name="T5">（　　　</text:span><text:span text:style-name="T6">1</text:span><text:span text:style-name="T5">　　）</text:span><text:span text:style-name="T14"> → </text:span><text:span text:style-name="T5">（　　　</text:span><text:span text:style-name="T6">2</text:span><text:span text:style-name="T5">　　）</text:span><text:span text:style-name="T14"> → </text:span><text:span text:style-name="T5">（　　　</text:span><text:span text:style-name="T6">3</text:span><text:span text:style-name="T5">　　）</text:span><text:span text:style-name="T14">。登入多加一層驗證叫 </text:span><text:span text:style-name="T5">（　　　</text:span><text:span text:style-name="T6">4</text:span><text:span text:style-name="T5">　　）</text:span><text:span text:style-name="T14">。</text:span></text:p>
            <text:p text:style-name="P14"><text:span text:style-name="T14">復原指標：能停多久＝</text:span><text:span text:style-name="T5">（　　　</text:span><text:span text:style-name="T6">5</text:span><text:span text:style-name="T5">　　）</text:span><text:span text:style-name="T14">（停機時間）；能丟幾小時資料＝</text:span><text:span text:style-name="T5">（　　　</text:span><text:span text:style-name="T6">6</text:span><text:span text:style-name="T5">　　）</text:span><text:span text:style-name="T14">（資料損失量）。遇災仍能持續營運的計畫叫 </text:span><text:span text:style-name="T5">（　　　</text:span><text:span text:style-name="T6">7</text:span><text:span text:style-name="T5">　　）</text:span><text:span text:style-name="T14">；備份應做 </text:span><text:span text:style-name="T5">（　　　</text:span><text:span text:style-name="T6">8</text:span><text:span text:style-name="T5">　　）</text:span><text:span text:style-name="T14">。</text:span></text:p>
            <text:p text:style-name="P14"><text:span text:style-name="T14">SSDLC 六階段：Define → Design → Develop → </text:span><text:span text:style-name="T5">（　　　</text:span><text:span text:style-name="T6">9</text:span><text:span text:style-name="T5">　　）</text:span><text:span text:style-name="T14"> → Deploy → </text:span><text:span text:style-name="T5">（　　　</text:span><text:span text:style-name="T6">10</text:span><text:span text:style-name="T5">　　）</text:span><text:span text:style-name="T14">，核心精神是 </text:span><text:span text:style-name="T5">（　　　</text:span><text:span text:style-name="T6">11</text:span><text:span text:style-name="T5">　　）</text:span><text:span text:style-name="T14">。</text:span></text:p>
            <text:p text:style-name="P14"><text:soft-page-break/><text:span text:style-name="T14">ISO 27001 建立的制度稱 </text:span><text:span text:style-name="T5">（　　　</text:span><text:span text:style-name="T6">12</text:span><text:span text:style-name="T5">　　）</text:span><text:span text:style-name="T14">，涵蓋四面向：人、技術、組織、</text:span><text:span text:style-name="T5">（　　　</text:span><text:span text:style-name="T6">13</text:span><text:span text:style-name="T5">　　）</text:span><text:span text:style-name="T14">。</text:span></text:p>
          </table:table-cell>
        </table:table-row>
      </table:table>
      <text:p text:style-name="P2"><text:span text:style-name="T4">伍、EDR/MDR/ATT&amp;CK/數位韌性 與 Zero Trust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2">🔐 <text:s/></text:span><text:span text:style-name="T9">進階防禦 / Zero Trust 填空</text:span></text:p>
            <text:p text:style-name="P13"><text:span text:style-name="T14">自己買工具守的是 </text:span><text:span text:style-name="T5">（　　　</text:span><text:span text:style-name="T6">1</text:span><text:span text:style-name="T5">　　）</text:span><text:span text:style-name="T14">（需內部資安人員）；委外 24/7 守的是 </text:span><text:span text:style-name="T5">（　　　</text:span><text:span text:style-name="T6">2</text:span><text:span text:style-name="T5">　　）</text:span><text:span text:style-name="T14">（適合中小企業）。全球通用駭客手法知識庫叫 </text:span><text:span text:style-name="T5">（　　　</text:span><text:span text:style-name="T6">3</text:span><text:span text:style-name="T5">　　）</text:span><text:span text:style-name="T14">，其 TTP 指戰術、技術、</text:span><text:span text:style-name="T5">（　　　</text:span><text:span text:style-name="T6">4</text:span><text:span text:style-name="T5">　　）</text:span><text:span text:style-name="T14">。</text:span></text:p>
            <text:p text:style-name="P14"><text:span text:style-name="T14">數位韌性的思維是「被打了還能 </text:span><text:span text:style-name="T5">（　　　</text:span><text:span text:style-name="T6">5</text:span><text:span text:style-name="T5">　　）</text:span><text:span text:style-name="T14">」，核心循環：預防 → 偵測 → </text:span><text:span text:style-name="T5">（　　　</text:span><text:span text:style-name="T6">6</text:span><text:span text:style-name="T5">　　）</text:span><text:span text:style-name="T14"> → 復原。</text:span></text:p>
            <text:p text:style-name="P14"><text:span text:style-name="T14">Zero Trust 核心：</text:span><text:span text:style-name="T5">（　　　</text:span><text:span text:style-name="T6">7</text:span><text:span text:style-name="T5">　　）</text:span><text:span text:style-name="T14">。三大支柱「人機境」：人＝</text:span><text:span text:style-name="T5">（　　　</text:span><text:span text:style-name="T6">8</text:span><text:span text:style-name="T5">　　）</text:span><text:span text:style-name="T14">、機＝</text:span><text:span text:style-name="T5">（　　　</text:span><text:span text:style-name="T6">9</text:span><text:span text:style-name="T5">　　）</text:span><text:span text:style-name="T14">、境＝</text:span><text:span text:style-name="T5">（　　　</text:span><text:span text:style-name="T6">10</text:span><text:span text:style-name="T5">　　）</text:span><text:span text:style-name="T14">。</text:span></text:p>
            <text:p text:style-name="P14"><text:span text:style-name="T14">四大機制：</text:span><text:span text:style-name="T5">（　　　</text:span><text:span text:style-name="T6">11</text:span><text:span text:style-name="T5">　　）</text:span><text:span text:style-name="T14"> ＋ </text:span><text:span text:style-name="T5">（　　　</text:span><text:span text:style-name="T6">12</text:span><text:span text:style-name="T5">　　）</text:span><text:span text:style-name="T14"> ＋ </text:span><text:span text:style-name="T5">（　　　</text:span><text:span text:style-name="T6">13</text:span><text:span text:style-name="T5">　　）</text:span><text:span text:style-name="T14"> ＋ </text:span><text:span text:style-name="T5">（　　　</text:span><text:span text:style-name="T6">14</text:span><text:span text:style-name="T5">　　）</text:span><text:span text:style-name="T14">。最常考陷阱：重點從「</text:span><text:span text:style-name="T5">（　　　</text:span><text:span text:style-name="T6">15</text:span><text:span text:style-name="T5">　　）</text:span><text:span text:style-name="T14">」轉移到身份/設備/情境。</text:span></text:p>
          </table:table-cell>
        </table:table-row>
      </table:table>
      <text:h text:style-name="P1" text:outline-level="1"><text:span text:style-name="T16">解 答 篇　（請先自測再核對）</text:span>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0"><text:span text:style-name="T12">✅ <text:s/></text:span><text:span text:style-name="T20">對答案</text:span></text:p>
            <text:p text:style-name="P11"><text:span text:style-name="T13">依篇章與小節列出答案，題號對應前面各篇橙色括號（每節題號從 1 重新計）。核對後把寫錯題號圈起來，回最終整合筆記對應篇章複習。</text:span></text:p>
          </table:table-cell>
        </table:table-row>
      </table:table>
      <text:h text:style-name="P3" text:outline-level="3"><text:span text:style-name="T18">▍</text:span><text:span text:style-name="T17"> 第一篇-A 分層　解答</text:span>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"><text:span text:style-name="T15">1. 寄什麼內容（內容與格式）　　　2. 重傳、流量控制</text:span></text:p>
            <text:p text:style-name="P12"><text:span text:style-name="T15">3. 規劃路線（路由）　　　4. 區域網路（LAN）</text:span></text:p>
            <text:p text:style-name="P12"><text:span text:style-name="T15">5. 網路層　　　6. 網路層</text:span></text:p>
            <text:p text:style-name="P12"><text:span text:style-name="T15">7. 7　　　8. 4</text:span></text:p>
            <text:p text:style-name="P12"><text:span text:style-name="T15">9. Presentation（表示層）　　　10. Session（會話層）</text:span></text:p>
            <text:p text:style-name="P12"><text:span text:style-name="T15">11. Application　　　12. MAC 位址</text:span></text:p>
            <text:p text:style-name="P12"><text:span text:style-name="T15">13. Physical（實體層）　　　14. Link</text:span></text:p>
          </table:table-cell>
        </table:table-row>
      </table:table>
      <text:h text:style-name="P3" text:outline-level="3"><text:span text:style-name="T18">▍</text:span><text:span text:style-name="T17"> 第一篇-B 協定　解答</text:span>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1"><text:span text:style-name="T15">1. DHCP　　　2. MQTT</text:span></text:p>
            <text:p text:style-name="P12"><text:span text:style-name="T15">3. UDP　　　4. ICMP</text:span></text:p>
            <text:p text:style-name="P12"><text:span text:style-name="T15">5. ARP　　　6. 自動分配 IP</text:span></text:p>
            <text:p text:style-name="P12"><text:span text:style-name="T15">7. 加密的遠端遙控（遠端登入）　　　8. 發布／訂閱（Publish/Subscribe）</text:span></text:p>
            <text:p text:style-name="P12"><text:span text:style-name="T15">9. 最短路徑　　　10. 3（網路）</text:span></text:p>
            <text:p text:style-name="P12"><text:span text:style-name="T15">11. Application</text:span></text:p>
          </table:table-cell>
        </table:table-row>
      </table:table>
      <text:h text:style-name="P3" text:outline-level="3"><text:span text:style-name="T18">▍</text:span><text:span text:style-name="T17"> 第一篇-C 網路層/工具　解答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1"><text:span text:style-name="T15">1. IP　　　2. Routing</text:span></text:p>
            <text:p text:style-name="P12"><text:span text:style-name="T15">3. ICMP　　　4. Echo Request</text:span></text:p>
            <text:p text:style-name="P12"><text:span text:style-name="T15">5. Echo Reply　　　6. 三向交握（握手）</text:span></text:p>
            <text:p text:style-name="P12"><text:span text:style-name="T15">7. 重傳　　　8. 慢</text:span></text:p>
            <text:p text:style-name="P12"><text:span text:style-name="T15">9. 快　　　10. DNS</text:span></text:p>
            <text:p text:style-name="P12"><text:span text:style-name="T15">11. IP　　　12. MAC</text:span></text:p>
            <text:p text:style-name="P12"><text:span text:style-name="T15">13. 連結（Link）　　　14. ARP Cache</text:span></text:p>
            <text:p text:style-name="P12"><text:span text:style-name="T15">15. 廣播　　　16. 單播（單一回應）</text:span></text:p>
            <text:p text:style-name="P12"><text:span text:style-name="T15">17. TTL　　　18. 1</text:span></text:p>
            <text:p text:style-name="P12"><text:span text:style-name="T15">19. Time Exceeded　　　20. 64</text:span></text:p>
            <text:p text:style-name="P12"><text:span text:style-name="T15">21. 128</text:span></text:p>
          </table:table-cell>
        </table:table-row>
      </table:table>
      <text:h text:style-name="P3" text:outline-level="3"><text:span text:style-name="T18">▍</text:span><text:span text:style-name="T17"> 第二篇-A 位址/分類　解答</text:span></text:h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1"><text:span text:style-name="T15">1. 32　　　2. 255</text:span></text:p>
            <text:p text:style-name="P12"><text:span text:style-name="T15">3. 2ⁿ　　　4. 126</text:span></text:p>
            <text:p text:style-name="P12"><text:span text:style-name="T15">5. 191　　　6. 223</text:span></text:p>
            <text:p text:style-name="P12"><text:span text:style-name="T15">7. Loopback（回送）　　　8. D 類（Multicast 群播）</text:span></text:p>
            <text:p text:style-name="P12"><text:span text:style-name="T15">9. E 類（實驗用）</text:span></text:p>
          </table:table-cell>
        </table:table-row>
      </table:table>
      <text:h text:style-name="P3" text:outline-level="3"><text:soft-page-break/><text:span text:style-name="T18">▍</text:span><text:span text:style-name="T17"> 第二篇-B 子網計算　解答</text:span>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1"><text:span text:style-name="T15">1. 網路部分（固定）　　　2. 6</text:span></text:p>
            <text:p text:style-name="P12"><text:span text:style-name="T15">3. 64　　　4. 網路位址</text:span></text:p>
            <text:p text:style-name="P12"><text:span text:style-name="T15">5. 廣播位址　　　6. 254</text:span></text:p>
            <text:p text:style-name="P12"><text:span text:style-name="T15">7. 62　　　8. 3021</text:span></text:p>
            <text:p text:style-name="P12"><text:span text:style-name="T15">9. 126　　　10. 30</text:span></text:p>
            <text:p text:style-name="P12"><text:span text:style-name="T15">11. 14　　　12. 6</text:span></text:p>
            <text:p text:style-name="P12"><text:span text:style-name="T15">13. 2　　　14. 大到小</text:span></text:p>
            <text:p text:style-name="P12"><text:span text:style-name="T15">15. +2　　　16. 對齊（Alignment）</text:span></text:p>
            <text:p text:style-name="P12"><text:span text:style-name="T15">17. 25　　　18. 26</text:span></text:p>
            <text:p text:style-name="P12"><text:span text:style-name="T15">19. 28　　　20. 連續</text:span></text:p>
            <text:p text:style-name="P12"><text:span text:style-name="T15">21. 2ⁿ　　　22. 對齊</text:span></text:p>
            <text:p text:style-name="P12"><text:span text:style-name="T15">23. 減 n　　　24. 24</text:span></text:p>
          </table:table-cell>
        </table:table-row>
      </table:table>
      <text:h text:style-name="P3" text:outline-level="3"><text:span text:style-name="T18">▍</text:span><text:span text:style-name="T17"> 第二篇-C 封包處理　解答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1"><text:span text:style-name="T15">1. 1500　　　2. Fragmentation</text:span></text:p>
            <text:p text:style-name="P12"><text:span text:style-name="T15">3. Router 或 Source　　　4. Source（送端）</text:span></text:p>
            <text:p text:style-name="P12"><text:span text:style-name="T15">5. 20　　　6. 65535</text:span></text:p>
            <text:p text:style-name="P12"><text:span text:style-name="T15">7. Identification（ID）　　　8. 8</text:span></text:p>
            <text:p text:style-name="P12"><text:span text:style-name="T15">9. 1　　　10. 6</text:span></text:p>
            <text:p text:style-name="P12"><text:span text:style-name="T15">11. 17　　　12. 禁止切割</text:span></text:p>
            <text:p text:style-name="P12"><text:span text:style-name="T15">13. Fragmentation Needed　　　14. 後面還有分段</text:span></text:p>
            <text:p text:style-name="P12"><text:span text:style-name="T15">15. MTU　　　16. 必須（強制）</text:span></text:p>
            <text:p text:style-name="P12"><text:span text:style-name="T15">17. Packet Too Big　　　18. 1460</text:span></text:p>
            <text:p text:style-name="P12"><text:span text:style-name="T15">19. 不完整 Fragment（缺一段）　　　20. Offset 重疊</text:span></text:p>
            <text:p text:style-name="P12"><text:span text:style-name="T15">21. 大量碎片　　　22. buffer 上限</text:span></text:p>
          </table:table-cell>
        </table:table-row>
      </table:table>
      <text:h text:style-name="P3" text:outline-level="3"><text:span text:style-name="T18">▍</text:span><text:span text:style-name="T17"> 第三篇　解答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1"><text:span text:style-name="T15">1. 32　　　2. 128</text:span></text:p>
            <text:p text:style-name="P12"><text:span text:style-name="T15">3. End-to-End　　　4. IPsec</text:span></text:p>
            <text:p text:style-name="P12"><text:span text:style-name="T15">5. 6434　　　6. 40</text:span></text:p>
            <text:p text:style-name="P12"><text:span text:style-name="T15">7. Flow Label　　　8. Multicast／Anycast</text:span></text:p>
            <text:p text:style-name="P12"><text:span text:style-name="T15">9. SLAAC　　　10. 安全（IPsec）</text:span></text:p>
            <text:p text:style-name="P12"><text:span text:style-name="T15">11. 自動（SLAAC）　　　12. Dual Stack</text:span></text:p>
            <text:p text:style-name="P12"><text:span text:style-name="T15">13. A　　　14. AAAA</text:span></text:p>
            <text:p text:style-name="P12"><text:span text:style-name="T15">15. IPv6　　　16. Tunneling</text:span></text:p>
            <text:p text:style-name="P12"><text:span text:style-name="T15">17. 6in4／Teredo　　　18. Translation</text:span></text:p>
            <text:p text:style-name="P12"><text:span text:style-name="T15">19. NAT64 + DNS64　　　20. 同時會中文＋英文</text:span></text:p>
            <text:p text:style-name="P12"><text:span text:style-name="T15">21. 英文信裝進中文信封偷渡　　　22. 現場請翻譯口譯</text:span></text:p>
          </table:table-cell>
        </table:table-row>
      </table:table>
      <text:h text:style-name="P3" text:outline-level="3"><text:span text:style-name="T18">▍</text:span><text:span text:style-name="T17"> 第四篇-A ARP/NAT　解答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1"><text:span text:style-name="T15">1. 家庭住址　　　2. 身分證號碼</text:span></text:p>
            <text:p text:style-name="P12"><text:span text:style-name="T15">3. MAC　　　4. LAN</text:span></text:p>
            <text:p text:style-name="P12"><text:span text:style-name="T15">5. ARP Spoofing　　　6. 中間人攻擊（MITM）</text:span></text:p>
            <text:p text:style-name="P12"><text:span text:style-name="T15">7. arp -a　　　8. 私有 IP</text:span></text:p>
            <text:p text:style-name="P12"><text:span text:style-name="T15">9. 公網 IP　　　10. Static NAT</text:span></text:p>
            <text:p text:style-name="P12"><text:span text:style-name="T15">11. Dynamic NAT　　　12. PAT</text:span></text:p>
            <text:p text:style-name="P12"><text:soft-page-break/><text:span text:style-name="T15">13. End-to-End（端對端）　　　14. P2P／VoIP</text:span></text:p>
            <text:p text:style-name="P12"><text:span text:style-name="T15">15. 延遲　　　16. Port Forwarding</text:span></text:p>
            <text:p text:style-name="P12"><text:span text:style-name="T15">17. UPnP　　　18. STUN</text:span></text:p>
            <text:p text:style-name="P12"><text:span text:style-name="T15">19. Symmetric NAT　　　20. TURN</text:span></text:p>
          </table:table-cell>
        </table:table-row>
      </table:table>
      <text:h text:style-name="P3" text:outline-level="3"><text:span text:style-name="T18">▍</text:span><text:span text:style-name="T17"> 第四篇-B 上網流程　解答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1"><text:span text:style-name="T15">1. IP　　　2. MAC</text:span></text:p>
            <text:p text:style-name="P12"><text:span text:style-name="T15">3. DNS　　　4. 路由器（預設閘道）</text:span></text:p>
            <text:p text:style-name="P12"><text:span text:style-name="T15">5. NAT　　　6. 私有 IP</text:span></text:p>
            <text:p text:style-name="P12"><text:span text:style-name="T15">7. 路由器　　　8. 路由器</text:span></text:p>
            <text:p text:style-name="P12"><text:span text:style-name="T15">9. NAT</text:span></text:p>
          </table:table-cell>
        </table:table-row>
      </table:table>
      <text:h text:style-name="P3" text:outline-level="3"><text:span text:style-name="T18">▍</text:span><text:span text:style-name="T17"> 第五篇-A 連線/攻擊　解答</text:span>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"><text:span text:style-name="T15">1. 重傳　　　2. 序號（Sequence Number）</text:span></text:p>
            <text:p text:style-name="P12"><text:span text:style-name="T15">3. 流量控制（rwnd）　　　4. 擁塞控制（cwnd）</text:span></text:p>
            <text:p text:style-name="P12"><text:span text:style-name="T15">5. SYN　　　6. SYN+ACK</text:span></text:p>
            <text:p text:style-name="P12"><text:span text:style-name="T15">7. ACK　　　8. 雙向都能傳資料</text:span></text:p>
            <text:p text:style-name="P12"><text:span text:style-name="T15">9. 半連線（Half-open）　　　10. DoS</text:span></text:p>
          </table:table-cell>
        </table:table-row>
      </table:table>
      <text:h text:style-name="P3" text:outline-level="3"><text:span text:style-name="T18">▍</text:span><text:span text:style-name="T17"> 第五篇-B 視窗/擁塞　解答</text:span>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1"><text:span text:style-name="T15">1. min(rwnd, cwnd)　　　2. 接收端</text:span></text:p>
            <text:p text:style-name="P12"><text:span text:style-name="T15">3. 網路　　　4. pipeline（流水線）</text:span></text:p>
            <text:p text:style-name="P12"><text:span text:style-name="T15">5. +1　　　6. 指數</text:span></text:p>
            <text:p text:style-name="P12"><text:span text:style-name="T15">7. ssthresh　　　8. 線性</text:span></text:p>
            <text:p text:style-name="P12"><text:span text:style-name="T15">9. 1　　　10. 減半</text:span></text:p>
            <text:p text:style-name="P12"><text:span text:style-name="T15">11. +1（加法增長）　　　12. 0.5（乘法減少）</text:span></text:p>
            <text:p text:style-name="P12"><text:span text:style-name="T15">13. 來回時間（送出到收到 ACK）</text:span></text:p>
          </table:table-cell>
        </table:table-row>
      </table:table>
      <text:h text:style-name="P3" text:outline-level="3"><text:span text:style-name="T18">▍</text:span><text:span text:style-name="T17"> 第六篇　解答</text:span>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1"><text:span text:style-name="T15">1. 網域名稱　　　2. IP 位址</text:span></text:p>
            <text:p text:style-name="P12"><text:span text:style-name="T15">3. 名稱伺服器　　　4. 郵件伺服器</text:span></text:p>
            <text:p text:style-name="P12"><text:span text:style-name="T15">5. 網域別名　　　6. Cache</text:span></text:p>
            <text:p text:style-name="P12"><text:span text:style-name="T15">7. Root　　　8. TLD</text:span></text:p>
            <text:p text:style-name="P12"><text:span text:style-name="T15">9. Authoritative　　　10. 13</text:span></text:p>
            <text:p text:style-name="P12"><text:span text:style-name="T15">11. Recursive（遞迴）　　　12. Iterative（反覆）</text:span></text:p>
            <text:p text:style-name="P12"><text:span text:style-name="T15">13. Cache Poisoning（快取污染）　　　14. DDoS 放大（反射）攻擊</text:span></text:p>
            <text:p text:style-name="P12"><text:span text:style-name="T15">15. 數位簽章　　　16. 不提供加密</text:span></text:p>
            <text:p text:style-name="P12"><text:span text:style-name="T15">17. DDoS</text:span></text:p>
          </table:table-cell>
        </table:table-row>
      </table:table>
      <text:h text:style-name="P3" text:outline-level="3"><text:span text:style-name="T18">▍</text:span><text:span text:style-name="T17"> 第七篇　解答</text:span>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11"><text:span text:style-name="T15">1. IGP　　　2. EGP</text:span></text:p>
            <text:p text:style-name="P12"><text:span text:style-name="T15">3. Area 0　　　4. Internal</text:span></text:p>
            <text:p text:style-name="P12"><text:span text:style-name="T15">5. Backbone　　　6. ABR</text:span></text:p>
            <text:p text:style-name="P12"><text:span text:style-name="T15">7. ASBR　　　8. 經過紀錄（經過哪些 AS）</text:span></text:p>
            <text:p text:style-name="P12"><text:span text:style-name="T15">9. Weight　　　10. Local Preference</text:span></text:p>
            <text:p text:style-name="P12"><text:span text:style-name="T15">11. AS-PATH　　　12. MED</text:span></text:p>
            <text:p text:style-name="P12"><text:soft-page-break/><text:span text:style-name="T15">13. Router ID　　　14. 政策</text:span></text:p>
            <text:p text:style-name="P12"><text:span text:style-name="T15">15. Local Preference　　　16. 能不能走</text:span></text:p>
            <text:p text:style-name="P12"><text:span text:style-name="T15">17. 你是誰　　　18. 怎麼走</text:span></text:p>
            <text:p text:style-name="P12"><text:span text:style-name="T15">19. 同一個 AS　　　20. iBGP</text:span></text:p>
            <text:p text:style-name="P12"><text:span text:style-name="T15">21. OSPF</text:span></text:p>
          </table:table-cell>
        </table:table-row>
      </table:table>
      <text:h text:style-name="P3" text:outline-level="3"><text:span text:style-name="T18">▍</text:span><text:span text:style-name="T17"> 第八篇　解答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1"><text:span text:style-name="T15">1. 控制平面　　　2. 資料平面</text:span></text:p>
            <text:p text:style-name="P12"><text:span text:style-name="T15">3. Control　　　4. 不同網路之間</text:span></text:p>
            <text:p text:style-name="P12"><text:span text:style-name="T15">5. 同一網路內　　　6. Round Robin</text:span></text:p>
            <text:p text:style-name="P12"><text:span text:style-name="T15">7. Weighted Round Robin　　　8. Session Stickiness</text:span></text:p>
            <text:p text:style-name="P12"><text:span text:style-name="T15">9. CNAME　　　10. 網址（非 IP）</text:span></text:p>
            <text:p text:style-name="P12"><text:span text:style-name="T15">11. Edge（邊緣）　　　12. eMBB</text:span></text:p>
            <text:p text:style-name="P12"><text:span text:style-name="T15">13. URLLC　　　14. mMTC</text:span></text:p>
            <text:p text:style-name="P12"><text:span text:style-name="T15">15. Network Slicing</text:span></text:p>
          </table:table-cell>
        </table:table-row>
      </table:table>
      <text:h text:style-name="P3" text:outline-level="3"><text:span text:style-name="T18">▍</text:span><text:span text:style-name="T17"> 第九篇　解答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1"><text:span text:style-name="T15">1. CSMA/CA　　　2. CSMA/CD</text:span></text:p>
            <text:p text:style-name="P12"><text:span text:style-name="T15">3. OFDM　　　4. Master</text:span></text:p>
            <text:p text:style-name="P12"><text:span text:style-name="T15">5. FHSS　　　6. 1600</text:span></text:p>
            <text:p text:style-name="P12"><text:span text:style-name="T15">7. EDCA　　　8. SCO</text:span></text:p>
            <text:p text:style-name="P12"><text:span text:style-name="T15">9. eSCO　　　10. Time Slot（時槽）</text:span></text:p>
            <text:p text:style-name="P12"><text:span text:style-name="T15">11. 省電　　　12. 資料鏈結層（Data Link）</text:span></text:p>
            <text:p text:style-name="P12"><text:span text:style-name="T15">13. Connection-oriented　　　14. Connectionless</text:span></text:p>
            <text:p text:style-name="P12"><text:span text:style-name="T15">15. Signaling Channel</text:span></text:p>
          </table:table-cell>
        </table:table-row>
      </table:table>
      <text:h text:style-name="P3" text:outline-level="3"><text:span text:style-name="T18">▍</text:span><text:span text:style-name="T17"> 第十篇-甲 設備　解答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><text:span text:style-name="T15">1. L3/L4　　　2. XSS</text:span></text:p>
            <text:p text:style-name="P12"><text:span text:style-name="T15">3. L7（應用層）　　　4. DPI（深度封包檢測）</text:span></text:p>
            <text:p text:style-name="P12"><text:span text:style-name="T15">5. DMZ　　　6. 惡意 Domain</text:span></text:p>
            <text:p text:style-name="P12"><text:span text:style-name="T15">7. 惡意 Hash　　　8. 惡意 IP</text:span></text:p>
            <text:p text:style-name="P12"><text:span text:style-name="T15">9. C2 Server　　　10. 事後證據</text:span></text:p>
            <text:p text:style-name="P12"><text:span text:style-name="T15">11. Proxy（正向代理）　　　12. Reverse Proxy（反向代理）</text:span></text:p>
            <text:p text:style-name="P12"><text:span text:style-name="T15">13. FW/NGFW　　　14. DMZ</text:span></text:p>
            <text:p text:style-name="P12"><text:span text:style-name="T15">15. WAF</text:span></text:p>
          </table:table-cell>
        </table:table-row>
      </table:table>
      <text:h text:style-name="P3" text:outline-level="3"><text:span text:style-name="T18">▍</text:span><text:span text:style-name="T17"> 第十篇-乙 攻防　解答</text:span></text:h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1"><text:span text:style-name="T15">1. SQL 指令　　　2. ' OR 1=1 --</text:span></text:p>
            <text:p text:style-name="P12"><text:span text:style-name="T15">3. 永遠成立　　　4. 註解（讓密碼驗證失效）</text:span></text:p>
            <text:p text:style-name="P12"><text:span text:style-name="T15">5. Prepared Statement（預備語句）　　　6. ?（佔位符）</text:span></text:p>
            <text:p text:style-name="P12"><text:span text:style-name="T15">7. WAF　　　8. 最小權限</text:span></text:p>
            <text:p text:style-name="P12"><text:span text:style-name="T15">9. 0（Day Zero）　　　10. Signature（特徵碼）</text:span></text:p>
            <text:p text:style-name="P12"><text:span text:style-name="T15">11. Patch（更新）　　　12. IDS/IPS</text:span></text:p>
            <text:p text:style-name="P12"><text:span text:style-name="T15">13. 網路分段</text:span></text:p>
          </table:table-cell>
        </table:table-row>
      </table:table>
      <text:h text:style-name="P3" text:outline-level="3"><text:soft-page-break/><text:span text:style-name="T18">▍</text:span><text:span text:style-name="T17"> 第十篇-丙 偵測　解答</text:span>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1"><text:span text:style-name="T15">1. 只偵測/警報（不阻擋）　　　2. 阻擋</text:span></text:p>
            <text:p text:style-name="P12"><text:span text:style-name="T15">3. Log　　　4. 封包</text:span></text:p>
            <text:p text:style-name="P12"><text:span text:style-name="T15">5. SNMP　　　6. 應用層</text:span></text:p>
            <text:p text:style-name="P12"><text:span text:style-name="T15">7. ICMP　　　8. 網路層</text:span></text:p>
          </table:table-cell>
        </table:table-row>
      </table:table>
      <text:h text:style-name="P3" text:outline-level="3"><text:span text:style-name="T18">▍</text:span><text:span text:style-name="T17"> 第十篇-丁 企業　解答</text:span>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1"><text:span text:style-name="T15">1. 事前預防　　　2. 事中偵測</text:span></text:p>
            <text:p text:style-name="P12"><text:span text:style-name="T15">3. 事後復原　　　4. MFA（多因素驗證）</text:span></text:p>
            <text:p text:style-name="P12"><text:span text:style-name="T15">5. RTO　　　6. RPO</text:span></text:p>
            <text:p text:style-name="P12"><text:span text:style-name="T15">7. BCP　　　8. 異地備份</text:span></text:p>
            <text:p text:style-name="P12"><text:span text:style-name="T15">9. Test　　　10. Maintain</text:span></text:p>
            <text:p text:style-name="P12"><text:span text:style-name="T15">11. 左移（Shift Left）　　　12. ISMS</text:span></text:p>
            <text:p text:style-name="P12"><text:span text:style-name="T15">13. 實體</text:span></text:p>
          </table:table-cell>
        </table:table-row>
      </table:table>
      <text:h text:style-name="P3" text:outline-level="3"><text:span text:style-name="T18">▍</text:span><text:span text:style-name="T17"> 第十篇-戊 進階/ZT　解答</text:span></text:h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1"><text:span text:style-name="T15">1. EDR　　　2. MDR</text:span></text:p>
            <text:p text:style-name="P12"><text:span text:style-name="T15">3. MITRE ATT&amp;CK　　　4. 流程（Procedures）</text:span></text:p>
            <text:p text:style-name="P12"><text:span text:style-name="T15">5. 撐住並快速恢復　　　6. 回應</text:span></text:p>
            <text:p text:style-name="P12"><text:span text:style-name="T15">7. 永不信任，始終驗證　　　8. Identity（身份）</text:span></text:p>
            <text:p text:style-name="P12"><text:span text:style-name="T15">9. Device（設備）　　　10. Context（情境）</text:span></text:p>
            <text:p text:style-name="P12"><text:span text:style-name="T15">11. MFA　　　12. 最小權限（Least Privilege）</text:span></text:p>
            <text:p text:style-name="P12"><text:span text:style-name="T15">13. 微分段（Micro-Segmentation）　　　14. 持續監控（Continuous Monitoring）</text:span></text:p>
            <text:p text:style-name="P12"><text:span text:style-name="T15">15. 位置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end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網路與資安 · 克漏字練習</text:span></text:p>
      </style:header>
      <style:footer>
        <text:p text:style-name="MP2"><text:span text:style-name="MT1">考前自我測驗　·　第 </text:span><text:page-number text:select-page="current">18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網路與資安 克漏字練習</dc:title>
    <meta:initial-creator>Claude</meta:initial-creator>
    <dc:creator>Un-named</dc:creator>
    <meta:editing-cycles>1</meta:editing-cycles>
    <meta:creation-date>2026-06-12T01:59:58.914000000</meta:creation-date>
    <dc:date>2026-06-12T01:59:58.915000000</dc:date>
    <meta:document-statistic meta:table-count="47" meta:image-count="0" meta:object-count="0" meta:page-count="18" meta:paragraph-count="342" meta:word-count="6024" meta:character-count="12384" meta:non-whitespace-character-count="9035"/>
    <meta:generator>MODA_ODF_Application_Tools/3.8.4.2$Windows_X86_64 LibreOffice_project/4fb77107d5af14329e08085efe4fa19b5633383a</meta:generator>
  </office:meta>
</office:document-meta>
</file>