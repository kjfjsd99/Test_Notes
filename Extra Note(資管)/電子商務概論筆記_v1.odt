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318cm" fo:padding-right="0.318cm" fo:padding-top="0.141cm" fo:padding-bottom="0.141cm" fo:border="none">
        <style:background-image/>
      </style:table-cell-properties>
    </style:style>
    <style:style style:name="表格2" style:family="table">
      <style:table-properties style:width="15.875cm" fo:margin-left="0cm" fo:margin-top="0cm" fo:margin-bottom="0cm" table:align="left" style:writing-mode="page"/>
    </style:style>
    <style:style style:name="表格2.A" style:family="table-column">
      <style:table-column-properties style:column-width="15.875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2efda" fo:padding-left="0.318cm" fo:padding-right="0.318cm" fo:padding-top="0.141cm" fo:padding-bottom="0.141cm" fo:border="none">
        <style:background-image/>
      </style:table-cell-properties>
    </style:style>
    <style:style style:name="表格3" style:family="table">
      <style:table-properties style:width="15.875cm" fo:margin-left="0.004cm" fo:margin-top="0cm" fo:margin-bottom="0cm" table:align="left" style:writing-mode="page"/>
    </style:style>
    <style:style style:name="表格3.A" style:family="table-column">
      <style:table-column-properties style:column-width="3.175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2e75b6" fo:padding="0.176cm" fo:border="0.25pt solid #2e75b6">
        <style:background-image/>
      </style:table-cell-properties>
    </style:style>
    <style:style style:name="表格3.B1" style:family="table-cell">
      <style:table-cell-properties style:vertical-align="middle" fo:background-color="#ddebf7" fo:padding="0.176cm" fo:border="0.25pt solid #2e75b6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41cm"/>
    </style:style>
    <style:style style:name="表格4.B" style:family="table-column">
      <style:table-column-properties style:column-width="12.1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4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4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4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4.B4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4.B5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4.41cm"/>
    </style:style>
    <style:style style:name="表格5.B" style:family="table-column">
      <style:table-column-properties style:column-width="12.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5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5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5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5.B4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ff2cc" fo:padding-left="0.318cm" fo:padding-right="0.318cm" fo:padding-top="0.141cm" fo:padding-bottom="0.141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141cm" fo:padding-bottom="0.141cm" fo:border="none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4.41cm"/>
    </style:style>
    <style:style style:name="表格8.B" style:family="table-column">
      <style:table-column-properties style:column-width="12.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8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8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8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6e4f0" fo:padding-left="0.318cm" fo:padding-right="0.318cm" fo:padding-top="0.141cm" fo:padding-bottom="0.141cm" fo:border="none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4.41cm"/>
    </style:style>
    <style:style style:name="表格10.B" style:family="table-column">
      <style:table-column-properties style:column-width="12.1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10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0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0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0.B4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0.B5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318cm" fo:padding-right="0.318cm" fo:padding-top="0.141cm" fo:padding-bottom="0.141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18cm" fo:padding-right="0.318cm" fo:padding-top="0.141cm" fo:padding-bottom="0.141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ae0f0" fo:padding-left="0.318cm" fo:padding-right="0.318cm" fo:padding-top="0.141cm" fo:padding-bottom="0.141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6e4f0" fo:padding-left="0.318cm" fo:padding-right="0.318cm" fo:padding-top="0.141cm" fo:padding-bottom="0.141cm" fo:border="none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4.41cm"/>
    </style:style>
    <style:style style:name="表格15.B" style:family="table-column">
      <style:table-column-properties style:column-width="12.1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15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5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4.41cm"/>
    </style:style>
    <style:style style:name="表格16.B" style:family="table-column">
      <style:table-column-properties style:column-width="12.1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16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6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ce4d6" fo:padding-left="0.318cm" fo:padding-right="0.318cm" fo:padding-top="0.141cm" fo:padding-bottom="0.141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318cm" fo:padding-right="0.318cm" fo:padding-top="0.141cm" fo:padding-bottom="0.141cm" fo:border="none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4.41cm"/>
    </style:style>
    <style:style style:name="表格19.B" style:family="table-column">
      <style:table-column-properties style:column-width="12.1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19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9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9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19.B4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3.528cm"/>
    </style:style>
    <style:style style:name="表格20.B" style:family="table-column">
      <style:table-column-properties style:column-width="7.054cm"/>
    </style:style>
    <style:style style:name="表格20.C" style:family="table-column">
      <style:table-column-properties style:column-width="5.9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4e79" fo:padding-left="0.212cm" fo:padding-right="0.212cm" fo:padding-top="0.141cm" fo:padding-bottom="0.141cm" fo:border="0.25pt solid #1f4e79">
        <style:background-image/>
      </style:table-cell-properties>
    </style:style>
    <style:style style:name="表格20.A2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20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2" style:family="table-cell">
      <style:table-cell-properties fo:background-color="#e2efda" fo:padding-left="0.212cm" fo:padding-right="0.212cm" fo:padding-top="0.141cm" fo:padding-bottom="0.141cm" fo:border="0.25pt solid #bdd7ee">
        <style:background-image/>
      </style:table-cell-properties>
    </style:style>
    <style:style style:name="表格20.A3" style:family="table-cell">
      <style:table-cell-properties style:vertical-align="middle" fo:background-color="#ddebf7" fo:padding-left="0.212cm" fo:padding-right="0.212cm" fo:padding-top="0.141cm" fo:padding-bottom="0.141cm" fo:border="0.25pt solid #bdd7ee">
        <style:background-image/>
      </style:table-cell-properties>
    </style:style>
    <style:style style:name="表格20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3" style:family="table-cell">
      <style:table-cell-properties fo:background-color="#fff2cc" fo:padding-left="0.212cm" fo:padding-right="0.212cm" fo:padding-top="0.141cm" fo:padding-bottom="0.141cm" fo:border="0.25pt solid #bdd7ee">
        <style:background-image/>
      </style:table-cell-properties>
    </style:style>
    <style:style style:name="表格20.B4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4" style:family="table-cell">
      <style:table-cell-properties fo:background-color="#e2efda" fo:padding-left="0.212cm" fo:padding-right="0.212cm" fo:padding-top="0.141cm" fo:padding-bottom="0.141cm" fo:border="0.25pt solid #bdd7ee">
        <style:background-image/>
      </style:table-cell-properties>
    </style:style>
    <style:style style:name="表格20.B5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5" style:family="table-cell">
      <style:table-cell-properties fo:background-color="#fff2cc" fo:padding-left="0.212cm" fo:padding-right="0.212cm" fo:padding-top="0.141cm" fo:padding-bottom="0.141cm" fo:border="0.25pt solid #bdd7ee">
        <style:background-image/>
      </style:table-cell-properties>
    </style:style>
    <style:style style:name="表格20.B6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6" style:family="table-cell">
      <style:table-cell-properties fo:background-color="#e2efda" fo:padding-left="0.212cm" fo:padding-right="0.212cm" fo:padding-top="0.141cm" fo:padding-bottom="0.141cm" fo:border="0.25pt solid #bdd7ee">
        <style:background-image/>
      </style:table-cell-properties>
    </style:style>
    <style:style style:name="表格20.B7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7" style:family="table-cell">
      <style:table-cell-properties fo:background-color="#fff2cc" fo:padding-left="0.212cm" fo:padding-right="0.212cm" fo:padding-top="0.141cm" fo:padding-bottom="0.141cm" fo:border="0.25pt solid #bdd7ee">
        <style:background-image/>
      </style:table-cell-properties>
    </style:style>
    <style:style style:name="表格20.B8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0.C8" style:family="table-cell">
      <style:table-cell-properties fo:background-color="#e2efda" fo:padding-left="0.212cm" fo:padding-right="0.212cm" fo:padding-top="0.141cm" fo:padding-bottom="0.141cm" fo:border="0.25pt solid #bdd7e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ebf3fb" fo:padding-left="0.318cm" fo:padding-right="0.318cm" fo:padding-top="0.141cm" fo:padding-bottom="0.141cm" fo:border="none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4.41cm"/>
    </style:style>
    <style:style style:name="表格22.B" style:family="table-column">
      <style:table-column-properties style:column-width="12.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d6e4f0" fo:padding-left="0.212cm" fo:padding-right="0.212cm" fo:padding-top="0.141cm" fo:padding-bottom="0.141cm" fo:border="0.25pt solid #bdd7ee">
        <style:background-image/>
      </style:table-cell-properties>
    </style:style>
    <style:style style:name="表格22.B1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2.B2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2.B3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2.B4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2.B5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表格22.B6" style:family="table-cell">
      <style:table-cell-properties fo:background-color="#ffffff" fo:padding-left="0.212cm" fo:padding-right="0.212cm" fo:padding-top="0.141cm" fo:padding-bottom="0.141cm" fo:border="0.25pt solid #bdd7ee">
        <style:background-image/>
      </style:table-cell-properties>
    </style:style>
    <style:style style:name="P1" style:family="paragraph" style:parent-style-name="Standard">
      <style:paragraph-properties fo:margin-top="0.847cm" fo:margin-bottom="0.106cm" style:contextual-spacing="false" fo:text-align="center" style:justify-single-word="false"/>
      <style:text-properties fo:color="#1f4e79" loext:opacity="100%" style:font-name="Arial" fo:font-size="32pt" fo:font-weight="bold" style:font-name-asian="Arial2" style:font-size-asian="32pt" style:font-weight-asian="bold" style:font-name-complex="Arial2" style:font-size-complex="32pt" style:font-weight-complex="bold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  <style:text-properties fo:color="#2e75b6" loext:opacity="100%"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color="#888888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0.141cm" fo:margin-bottom="0.847cm" style:contextual-spacing="false" fo:text-align="center" style:justify-single-word="false" fo:padding-left="0cm" fo:padding-right="0cm" fo:padding-top="0cm" fo:padding-bottom="0.212cm" fo:border-left="none" fo:border-right="none" fo:border-top="none" fo:border-bottom="0.99pt solid #2e75b6"/>
      <style:text-properties fo:color="#666666" loext:opacity="100%" style:font-name="Arial" fo:font-size="11pt" style:font-name-asian="Arial2" style:font-size-asian="11pt" style:font-name-complex="Arial2" style:font-size-complex="11pt"/>
    </style:style>
    <style:style style:name="P5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2e75b6"/>
      <style:text-properties fo:color="#1f4e7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6" style:family="paragraph" style:parent-style-name="Standard">
      <style:paragraph-properties fo:margin-top="0.106cm" fo:margin-bottom="0.106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paragraph-properties fo:margin-top="0.071cm" fo:margin-bottom="0.071cm" style:contextual-spacing="false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0" style:family="paragraph" style:parent-style-name="Standard">
      <style:paragraph-properties fo:margin-top="0.071cm" fo:margin-bottom="0.071cm" style:contextual-spacing="false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1" style:family="paragraph" style:parent-style-name="Standard">
      <style:paragraph-properties fo:margin-top="0.106cm" fo:margin-bottom="0.106cm" style:contextual-spacing="false"/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P12" style:family="paragraph" style:parent-style-name="Heading_20_2">
      <style:paragraph-properties fo:margin-top="0.494cm" fo:margin-bottom="0.141cm" style:contextual-spacing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d6e4f0" loext:opacity="100%" style:font-name="Arial" fo:font-size="9pt" style:font-name-asian="Arial2" style:font-size-asian="9pt" style:font-name-complex="Arial2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1f4e79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8" style:family="paragraph" style:parent-style-name="Standard">
      <style:text-properties style:font-name="Arial" fo:font-size="11pt" style:font-name-asian="Arial2" style:font-size-asian="11pt" style:font-name-complex="Arial2" style:font-size-complex="11pt"/>
    </style:style>
    <style:style style:name="P19" style:family="paragraph" style:parent-style-name="Heading_20_2">
      <style:paragraph-properties fo:margin-top="0.494cm" fo:margin-bottom="0.141cm" style:contextual-spacing="false"/>
    </style:style>
    <style:style style:name="P20" style:family="paragraph" style:parent-style-name="Standard">
      <style:paragraph-properties fo:margin-top="0.071cm" fo:margin-bottom="0.071cm" style:contextual-spacing="false"/>
    </style:style>
    <style:style style:name="P21" style:family="paragraph" style:parent-style-name="Standard">
      <style:paragraph-properties fo:margin-top="0.353cm" fo:margin-bottom="0.106cm" style:contextual-spacing="false"/>
      <style:text-properties fo:color="#1f4e7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ff00" style:font-name-asian="Arial2" style:font-size-asian="11pt" style:font-weight-asian="bold" style:font-name-complex="Arial2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6" style:family="paragraph" style:parent-style-name="Standard">
      <style:text-properties fo:color="#1f4e79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27" style:family="paragraph" style:parent-style-name="Standard">
      <style:text-properties style:font-name="Arial" fo:font-size="10.5pt" style:font-name-asian="Arial2" style:font-size-asian="10.5pt" style:font-name-complex="Arial2" style:font-size-complex="10.5pt"/>
    </style:style>
    <style:style style:name="P28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51pt solid #2e75b6"/>
    </style:style>
    <style:style style:name="P29" style:family="paragraph" style:parent-style-name="Standard">
      <style:paragraph-properties fo:margin-top="0.212cm" fo:margin-bottom="0.106cm" style:contextual-spacing="false" fo:text-align="center" style:justify-single-word="false"/>
      <style:text-properties fo:color="#888888" loext:opacity="100%" style:font-name="Arial" fo:font-size="9pt" style:font-name-asian="Arial2" style:font-size-asian="9pt" style:font-name-complex="Arial2" style:font-size-complex="9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fo:background-color="#e040fb" loext:char-shading-value="0" style:font-weight-asian="bold" style:font-weight-complex="bold"/>
    </style:style>
    <style:style style:name="T3" style:family="text">
      <style:text-properties fo:background-color="#ff4081" loext:char-shading-value="0"/>
    </style:style>
    <style:style style:name="T4" style:family="text">
      <style:text-properties fo:color="#ffc400" loext:opacity="100%" fo:background-color="#1a1a2e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7" style:family="text">
      <style:text-properties fo:color="#ffff00" loext:opacity="100%" fo:font-weight="bold" fo:background-color="#4e342e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background-color="#ffea00" loext:char-shading-value="0"/>
    </style:style>
    <style:style style:name="T10" style:family="text">
      <style:text-properties fo:color="#18ffff" loext:opacity="100%" fo:background-color="#e040fb" loext:char-shading-value="0"/>
    </style:style>
    <style:style style:name="T11" style:family="text">
      <style:text-properties fo:font-weight="bold" fo:background-color="#18ffff" loext:char-shading-value="0" style:font-weight-asian="bold" style:font-weight-complex="bold"/>
    </style:style>
    <style:style style:name="T12" style:family="text">
      <style:text-properties fo:font-weight="bold" fo:background-color="#76ff03" loext:char-shading-value="0" style:font-weight-asian="bold" style:font-weight-complex="bold"/>
    </style:style>
    <style:style style:name="T13" style:family="text">
      <style:text-properties fo:color="#1a1a2e" loext:opacity="100%" fo:font-weight="bold" fo:background-color="#ff5252" loext:char-shading-value="0" style:font-weight-asian="bold" style:font-weight-complex="bold"/>
    </style:style>
    <style:style style:name="T14" style:family="text"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5" style:family="text">
      <style:text-properties fo:color="#18ffff" loext:opacity="100%" style:font-name="Arial" fo:font-size="14pt" fo:font-weight="bold" fo:background-color="#e040fb" loext:char-shading-value="0" style:font-name-asian="Arial2" style:font-size-asian="14pt" style:font-weight-asian="bold" style:font-name-complex="Arial2" style:font-size-complex="14pt" style:font-weight-complex="bold"/>
    </style:style>
    <style:style style:name="T16" style:family="text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8" style:family="text">
      <style:text-properties fo:color="#1f4e79" loext:opacity="100%" style:font-name="Arial" fo:font-size="11pt" fo:font-weight="bold" style:font-name-asian="Arial1" style:font-size-asian="11pt" style:font-weight-asian="bold" style:font-name-complex="Arial2" style:font-size-complex="11pt" style:font-weight-complex="bold"/>
    </style:style>
    <style:style style:name="T19" style:family="text">
      <style:text-properties fo:color="#ffc40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0" style:family="text">
      <style:text-properties fo:color="#18ffff" loext:opacity="100%" fo:font-weight="bold" fo:background-color="#ff1744" loext:char-shading-value="0" style:font-weight-asian="bold" style:font-weight-complex="bold"/>
    </style:style>
    <style:style style:name="T21" style:family="text">
      <style:text-properties fo:color="#76ff03" loext:opacity="100%" fo:background-color="#000000" loext:char-shading-value="0"/>
    </style:style>
    <style:style style:name="T22" style:family="text">
      <style:text-properties style:font-name="Arial" fo:font-size="11pt" fo:font-weight="normal" fo:background-color="#ffff00" loext:char-shading-value="0" style:font-name-asian="Arial2" style:font-size-asian="11pt" style:font-weight-asian="normal" style:font-name-complex="Arial2" style:font-size-complex="11pt" style:font-weight-complex="normal"/>
    </style:style>
    <style:style style:name="T23" style:family="text">
      <style:text-properties fo:color="#fafafa" loext:opacity="100%" style:font-name="Arial" fo:font-size="11pt" fo:font-weight="bold" fo:background-color="#e040fb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background-color="#76ff03" loext:char-shading-value="0"/>
    </style:style>
    <style:style style:name="T25" style:family="text">
      <style:text-properties fo:background-color="#ffc400" loext:char-shading-value="0"/>
    </style:style>
    <style:style style:name="T26" style:family="text">
      <style:text-properties fo:background-color="#18ffff" loext:char-shading-value="0"/>
    </style:style>
    <style:style style:name="T27" style:family="text">
      <style:text-properties fo:background-color="#ff9100" loext:char-shading-value="0"/>
    </style:style>
    <style:style style:name="T28" style:family="text">
      <style:text-properties fo:background-color="#1de9b6" loext:char-shading-value="0"/>
    </style:style>
    <style:style style:name="T29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30" style:family="text">
      <style:text-properties fo:background-color="#ffff00" loext:char-shading-value="0"/>
    </style:style>
    <style:style style:name="T31" style:family="text">
      <style:text-properties fo:font-weight="bold" fo:background-color="#18ffff" loext:char-shading-value="0" style:font-weight-asian="bold" style:font-weight-complex="bold"/>
    </style:style>
    <style:style style:name="T32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33" style:family="text">
      <style:text-properties fo:color="#f5f5f5" loext:opacity="100%" fo:font-weight="bold" fo:background-color="#ff1744" loext:char-shading-value="0" style:font-weight-asian="bold" style:font-weight-complex="bold"/>
    </style:style>
    <style:style style:name="T34" style:family="text">
      <style:text-properties fo:color="#fff176" loext:opacity="100%" fo:font-weight="bold" style:font-weight-asian="bold" style:font-weight-complex="bold"/>
    </style:style>
    <style:style style:name="T35" style:family="text">
      <style:text-properties fo:color="#fff176" loext:opacity="100%" fo:font-weight="bold" fo:background-color="#4e342e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電子商務概論</text:p>
      <text:p text:style-name="P2">核心概念完整筆記</text:p>
      <text:p text:style-name="P3">一看就懂・超級新手版 🚀</text:p>
      <text:p text:style-name="P4">以蝦皮為例，完整說明電商平台的運作邏輯</text:p>
      <text:h text:style-name="P5" text:outline-level="1">🎯 這章在講什麼？</text:h>
      <text:p text:style-name="P6">這章的核心主題只有一句話：</text:p>
      <text:p text:style-name="P7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>「網路平台如何整合<text:span text:style-name="T1">買家、賣家、物流與付款</text:span>，讓交易更有效率、成本更低。」</text:p>
          </table:table-cell>
        </table:table-row>
      </table:table>
      <text:p text:style-name="P7"/>
      <text:p text:style-name="P6">你熟悉的這些平台，本質都是同一件事——</text:p>
      <text:list text:style-name="WWNum2">
        <text:list-item text:start-value="1">
          <text:p text:style-name="P9">蝦皮 / PChome / momo → 商品交易平台</text:p>
        </text:list-item>
        <text:list-item>
          <text:p text:style-name="P9">Uber → 交通服務媒合平台</text:p>
        </text:list-item>
        <text:list-item>
          <text:p text:style-name="P9">foodpanda → 餐飲外送媒合平台</text:p>
        </text:list-item>
      </text:list>
      <text:p text:style-name="P6">它們共同的邏輯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2">平台降低交易門檻 </text:span><text:s/>→ <text:s/>更多人參與 <text:s/>→ <text:s/>平台價值越來越高</text:p>
          </table:table-cell>
        </table:table-row>
      </table:table>
      <text:p text:style-name="P7"/>
      <text:h text:style-name="P5" text:outline-level="1">📦 一、Porter 價值鏈（Value Chain）(<text:span text:style-name="T3">口訣</text:span>：<text:span text:style-name="T4">進營出銷服，基人技採補</text:span>)</text:h>
      <text:p text:style-name="P6">Porter 價值鏈描述的是：一家<text:span text:style-name="T5">公司</text:span>從「<text:span text:style-name="T6">取得原料</text:span>」到「<text:span text:style-name="T7">完成銷售</text:span>」的每一個步驟，<text:span text:style-name="T8">每個步驟都在為商品或服務「增加價值」</text:span>。</text:p>
      <text:p text:style-name="P11">想像一條工廠流水線：原料 → 加工 → 包裝 → 出貨 → 售後，<text:span text:style-name="T9">每一道工序都讓產品更值錢</text:span>。</text:p>
      <text:p text:style-name="P7"/>
      <text:h text:style-name="P12" text:outline-level="2">▶ <text:span text:style-name="T10">主要活動（Primary Activities）</text:span>——直接創造收入的流程</text:h>
      <text:p text:style-name="P6">這五個步驟是公司「直接賺錢」的核心流程：</text:p>
      <text:p text:style-name="P7"/>
      <table:table table:name="表格3" table:style-name="表格3">
        <table:table-column table:style-name="表格3.A" table:number-columns-repeated="5"/>
        <table:table-row table:style-name="表格3.1">
          <table:table-cell table:style-name="表格3.A1" office:value-type="string">
            <text:p text:style-name="P13">📥 進貨物流</text:p>
            <text:p text:style-name="P14">商品如何進來</text:p>
          </table:table-cell>
          <table:table-cell table:style-name="表格3.B1" office:value-type="string">
            <text:p text:style-name="P15">⚙️ 營運作業</text:p>
            <text:p text:style-name="P16">處理與管理</text:p>
          </table:table-cell>
          <table:table-cell table:style-name="表格3.A1" office:value-type="string">
            <text:p text:style-name="P13">📤 出貨物流</text:p>
            <text:p text:style-name="P14">商品如何送出</text:p>
          </table:table-cell>
          <table:table-cell table:style-name="表格3.B1" office:value-type="string">
            <text:p text:style-name="P15">📣 行銷銷售</text:p>
            <text:p text:style-name="P16">吸引顧客購買</text:p>
          </table:table-cell>
          <table:table-cell table:style-name="表格3.A1" office:value-type="string">
            <text:p text:style-name="P13">🛎️ 售後服務</text:p>
            <text:p text:style-name="P14">購後維繫顧客</text:p>
          </table:table-cell>
        </table:table-row>
      </table:table>
      <text:p text:style-name="P7"/>
      <text:p text:style-name="P6">以「蝦皮賣手機」為例：</text:p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17">📥 <text:span text:style-name="T1">進貨</text:span>物流</text:p>
          </table:table-cell>
          <table:table-cell table:style-name="表格4.B1" office:value-type="string">
            <text:p text:style-name="P18">廠商將手機送抵蝦皮倉庫，系統記錄庫存數量</text:p>
          </table:table-cell>
        </table:table-row>
        <table:table-row table:style-name="表格4.1">
          <table:table-cell table:style-name="表格4.A1" office:value-type="string">
            <text:p text:style-name="P17">⚙️ <text:s text:c="4"/><text:span text:style-name="T1">營運</text:span>作業</text:p>
          </table:table-cell>
          <table:table-cell table:style-name="表格4.B2" office:value-type="string">
            <text:p text:style-name="P18"><text:span text:style-name="T8">系統自動接單</text:span>、<text:span text:style-name="T11">包裝商品</text:span>、<text:span text:style-name="T12">管理倉儲</text:span></text:p>
          </table:table-cell>
        </table:table-row>
        <table:table-row table:style-name="表格4.1">
          <table:table-cell table:style-name="表格4.A1" office:value-type="string">
            <text:p text:style-name="P17">📤 <text:span text:style-name="T1">出貨</text:span>物流</text:p>
          </table:table-cell>
          <table:table-cell table:style-name="表格4.B3" office:value-type="string">
            <text:p text:style-name="P18">黑貓<text:span text:style-name="T1">宅配</text:span>、超商取貨、蝦皮店到店</text:p>
          </table:table-cell>
        </table:table-row>
        <table:table-row table:style-name="表格4.1">
          <table:table-cell table:style-name="表格4.A1" office:value-type="string">
            <text:p text:style-name="P17">📣 <text:span text:style-name="T1">行銷</text:span>銷售</text:p>
          </table:table-cell>
          <table:table-cell table:style-name="表格4.B4" office:value-type="string">
            <text:p text:style-name="P18"><text:span text:style-name="T13">推播廣告</text:span>、<text:span text:style-name="T11">優惠券</text:span>、<text:span text:style-name="T12">首頁輪播推薦商品</text:span></text:p>
          </table:table-cell>
        </table:table-row>
        <text:soft-page-break/>
        <table:table-row table:style-name="表格4.1">
          <table:table-cell table:style-name="表格4.A1" office:value-type="string">
            <text:p text:style-name="P17">🛎️ <text:span text:style-name="T1">售後</text:span>服務</text:p>
          </table:table-cell>
          <table:table-cell table:style-name="表格4.B5" office:value-type="string">
            <text:p text:style-name="P18">線上客服、退換貨申請、保固處理</text:p>
          </table:table-cell>
        </table:table-row>
      </table:table>
      <text:p text:style-name="P7"/>
      <text:h text:style-name="P19" text:outline-level="2"><text:span text:style-name="T14">▶ </text:span><text:span text:style-name="T15">支援活動（Support Activities）</text:span><text:span text:style-name="T14">——幕後維持公司運作</text:span></text:h>
      <text:p text:style-name="P6">支援活動不直接賺錢，但少了它們，主要活動就無法順暢運作：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7">🏢 基礎設施</text:p>
          </table:table-cell>
          <table:table-cell table:style-name="表格5.B1" office:value-type="string">
            <text:p text:style-name="P18">財務、法務、IT 系統、公司治理</text:p>
          </table:table-cell>
        </table:table-row>
        <table:table-row table:style-name="表格5.1">
          <table:table-cell table:style-name="表格5.A1" office:value-type="string">
            <text:p text:style-name="P17">👥 人力資源</text:p>
          </table:table-cell>
          <table:table-cell table:style-name="表格5.B2" office:value-type="string">
            <text:p text:style-name="P18">招募、訓練、薪資、員工管理</text:p>
          </table:table-cell>
        </table:table-row>
        <table:table-row table:style-name="表格5.1">
          <table:table-cell table:style-name="表格5.A1" office:value-type="string">
            <text:p text:style-name="P17">💻 技術發展</text:p>
          </table:table-cell>
          <table:table-cell table:style-name="表格5.B3" office:value-type="string">
            <text:p text:style-name="P18">APP 開發、AI 推薦系統、網站維護</text:p>
          </table:table-cell>
        </table:table-row>
        <table:table-row table:style-name="表格5.1">
          <table:table-cell table:style-name="表格5.A1" office:value-type="string">
            <text:p text:style-name="P17">🛒 採購</text:p>
          </table:table-cell>
          <table:table-cell table:style-name="表格5.B4" office:value-type="string">
            <text:p text:style-name="P18">購買伺服器、物流設備、辦公資源</text:p>
          </table:table-cell>
        </table:table-row>
      </table:table>
      <text:p text:style-name="P7"/>
      <text:h text:style-name="P12" text:outline-level="2">▶ 導入資訊系統後，各環節的效益</text:h>
      <text:p text:style-name="P6">當企業引入雲端訂單系統或其他資訊技術後，每個活動都能明顯提升效率：</text:p>
      <text:p text:style-name="P7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0"><text:span text:style-name="T16">📥 進貨： <text:s/></text:span><text:span text:style-name="T17">即時庫存監控，系統自動偵測缺貨並觸發補貨流程，不再靠人工盤點</text:span></text:p>
          </table:table-cell>
        </table:table-row>
        <table:table-row table:style-name="表格6.1">
          <table:table-cell table:style-name="表格6.A1" office:value-type="string">
            <text:p text:style-name="P20"><text:span text:style-name="T18">⚙️ 營運： <text:s/></text:span><text:span text:style-name="T17">自動化訂單處理，大幅減少人為錯誤，同時縮短作業時間</text:span></text:p>
          </table:table-cell>
        </table:table-row>
        <table:table-row table:style-name="表格6.1">
          <table:table-cell table:style-name="表格6.A1" office:value-type="string">
            <text:p text:style-name="P20"><text:span text:style-name="T16">📣 行銷： <text:s/></text:span><text:span text:style-name="T17">數據分析精準投放廣告（例：你搜尋「鍵盤」後，各平台隨即推送相關商品）</text:span></text:p>
          </table:table-cell>
        </table:table-row>
        <table:table-row table:style-name="表格6.1">
          <table:table-cell table:style-name="表格6.A1" office:value-type="string">
            <text:p text:style-name="P20"><text:span text:style-name="T16">整體效益： <text:s/></text:span><text:span text:style-name="T17">效率↑、透明度↑、決策品質↑ — 管理更輕鬆，競爭力更強</text:span></text:p>
          </table:table-cell>
        </table:table-row>
      </table:table>
      <text:p text:style-name="P7"/>
      <text:h text:style-name="P5" text:outline-level="1">🏆 二、SIS — 策略資訊系統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0"><text:span text:style-name="T16">全名： <text:s/></text:span><text:span text:style-name="T17">Strategic Information System（策略資訊系統）</text:span></text:p>
          </table:table-cell>
        </table:table-row>
        <table:table-row table:style-name="表格7.1">
          <table:table-cell table:style-name="表格7.A1" office:value-type="string">
            <text:p text:style-name="P20"><text:span text:style-name="T16">白話： <text:s/></text:span><text:span text:style-name="T17">利用</text:span><text:span text:style-name="T19">資訊系統</text:span><text:span text:style-name="T17">取得競爭優勢，改變市場遊戲規則</text:span></text:p>
          </table:table-cell>
        </table:table-row>
      </table:table>
      <text:p text:style-name="P7"/>
      <text:p text:style-name="P6">SIS 的重點不在技術本身，而在於「<text:span text:style-name="T20">如何用技術讓競爭對手難以超越</text:span>」。</text:p>
      <text:p text:style-name="P7"/>
      <text:p text:style-name="P21">📌 典型案例</text:p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7">Uber</text:p>
          </table:table-cell>
          <table:table-cell table:style-name="表格8.B1" office:value-type="string">
            <text:p text:style-name="P18">用 APP 解決叫車困難的痛點，顛覆傳統計程車市場；乘客與司機雙方都從中受益</text:p>
          </table:table-cell>
        </table:table-row>
        <table:table-row table:style-name="表格8.1">
          <table:table-cell table:style-name="表格8.A1" office:value-type="string">
            <text:p text:style-name="P17">蝦皮</text:p>
          </table:table-cell>
          <table:table-cell table:style-name="表格8.B2" office:value-type="string">
            <text:p text:style-name="P18">整合推薦系統、金流系統（蝦皮支付）、物流追蹤，讓用戶黏著度遠超傳統網購</text:p>
          </table:table-cell>
        </table:table-row>
        <table:table-row table:style-name="表格8.1">
          <table:table-cell table:style-name="表格8.A1" office:value-type="string">
            <text:p text:style-name="P17">Amazon</text:p>
          </table:table-cell>
          <table:table-cell table:style-name="表格8.B3" office:value-type="string">
            <text:p text:style-name="P18">用個人化推薦演算法與 Prime 物流體系建立超高轉換率，競爭對手難以複製</text:p>
          </table:table-cell>
        </table:table-row>
      </table:table>
      <text:p text:style-name="P7"/>
      <text:p text:style-name="P22">💡 考試重點：SIS 不只是「用電腦做生意」，而是「<text:span text:style-name="T21">讓資訊系統成為競爭壁壘</text:span>」。</text:p>
      <text:p text:style-name="P7"/>
      <text:h text:style-name="P5" text:outline-level="1"><text:soft-page-break/>💰 三、TCT — 交易成本理論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<text:span text:style-name="T16">全名： <text:s/></text:span><text:span text:style-name="T17">Transaction Cost Theory（交易成本理論）</text:span></text:p>
          </table:table-cell>
        </table:table-row>
        <table:table-row table:style-name="表格9.1">
          <table:table-cell table:style-name="表格9.A1" office:value-type="string">
            <text:p text:style-name="P20"><text:span text:style-name="T16">白話： <text:s/></text:span><text:span text:style-name="T22">每一筆交易</text:span><text:span text:style-name="T17">除了商品本身的費用，還有許多「</text:span><text:span text:style-name="T23">隱藏成本</text:span><text:span text:style-name="T17">」</text:span></text:p>
          </table:table-cell>
        </table:table-row>
      </table:table>
      <text:p text:style-name="P7"/>
      <text:p text:style-name="P21">🔍 交易成本有哪些？</text:p>
      <text:p text:style-name="P6">假設你想在二手市場買一張<text:span text:style-name="T1">顯卡</text:span>：</text:p>
      <text:list text:continue-numbering="true" text:style-name="WWNum2">
        <text:list-item>
          <text:p text:style-name="P9">搜尋成本 → 花時間到處找有在賣的人</text:p>
        </text:list-item>
        <text:list-item>
          <text:p text:style-name="P9">比價成本 → 比較多個賣家的價格與品質</text:p>
        </text:list-item>
        <text:list-item>
          <text:p text:style-name="P9">信任成本 → 擔心被騙、確認賣家評價</text:p>
        </text:list-item>
        <text:list-item>
          <text:p text:style-name="P9">協調成本 → 約時間、確定交貨方式</text:p>
        </text:list-item>
        <text:list-item>
          <text:p text:style-name="P9">風險成本 → 驗貨、退貨的麻煩</text:p>
        </text:list-item>
      </text:list>
      <text:p text:style-name="P7"/>
      <text:p text:style-name="P21">🛍️ 電商平台如何降低這些成本？</text:p>
      <text:p text:style-name="P6">以蝦皮為例，它幫你一次解決所有隱藏成本：</text:p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17">搜尋成本↓</text:p>
          </table:table-cell>
          <table:table-cell table:style-name="表格10.B1" office:value-type="string">
            <text:p text:style-name="P18"><text:span text:style-name="T24">搜尋列 + </text:span><text:span text:style-name="T2">篩選</text:span><text:span text:style-name="T24">功能</text:span>，幾秒找到目標商品</text:p>
          </table:table-cell>
        </table:table-row>
        <table:table-row table:style-name="表格10.1">
          <table:table-cell table:style-name="表格10.A1" office:value-type="string">
            <text:p text:style-name="P17">比價成本↓</text:p>
          </table:table-cell>
          <table:table-cell table:style-name="表格10.B2" office:value-type="string">
            <text:p text:style-name="P18"><text:span text:style-name="T25">同款商品自動排列比較</text:span>，還有比價外掛</text:p>
          </table:table-cell>
        </table:table-row>
        <table:table-row table:style-name="表格10.1">
          <table:table-cell table:style-name="表格10.A1" office:value-type="string">
            <text:p text:style-name="P17">信任成本↓</text:p>
          </table:table-cell>
          <table:table-cell table:style-name="表格10.B3" office:value-type="string">
            <text:p text:style-name="P18"><text:span text:style-name="T8">賣家評分</text:span>、<text:span text:style-name="T8">買家評論</text:span>、<text:span text:style-name="T1">官方認證賣家</text:span></text:p>
          </table:table-cell>
        </table:table-row>
        <table:table-row table:style-name="表格10.1">
          <table:table-cell table:style-name="表格10.A1" office:value-type="string">
            <text:p text:style-name="P17">協調成本↓</text:p>
          </table:table-cell>
          <table:table-cell table:style-name="表格10.B4" office:value-type="string">
            <text:p text:style-name="P18">一鍵下單、線上付款、物流追蹤</text:p>
          </table:table-cell>
        </table:table-row>
        <table:table-row table:style-name="表格10.1">
          <table:table-cell table:style-name="表格10.A1" office:value-type="string">
            <text:p text:style-name="P17">風險成本↓</text:p>
          </table:table-cell>
          <table:table-cell table:style-name="表格10.B5" office:value-type="string">
            <text:p text:style-name="P18">蝦皮擔保付款：收到貨、確認沒問題才撥款給賣家</text:p>
          </table:table-cell>
        </table:table-row>
      </table:table>
      <text:p text:style-name="P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>→ <text:span text:style-name="T26">交易成本越低，越多人願意交易</text:span>，平台的交易量就越大。這是電商平台存在的核心理由。</text:p>
          </table:table-cell>
        </table:table-row>
      </table:table>
      <text:p text:style-name="P7"/>
      <text:h text:style-name="P5" text:outline-level="1">🌐 四、網路效應（Network Effect）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0"><text:span text:style-name="T16">白話： <text:s/></text:span><text:span text:style-name="T17">使用人數越多，平台對每個人的價值就越高</text:span></text:p>
          </table:table-cell>
        </table:table-row>
      </table:table>
      <text:p text:style-name="P7"/>
      <text:p text:style-name="P21">📱 Facebook 的例子</text:p>
      <text:p text:style-name="P6">如果 Facebook 只有你一個人，它毫無價值；但當全世界都在用，它就變得不可或缺。這就是網路效應的威力。</text:p>
      <text:p text:style-name="P7"/>
      <text:p text:style-name="P21">🔄 蝦皮的正向循環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><text:span text:style-name="T1">買家</text:span>增加 <text:s/>→ <text:s/>更多<text:span text:style-name="T27">賣家</text:span>願意進駐</text:p>
          </table:table-cell>
        </table:table-row>
        <table:table-row table:style-name="表格13.1">
          <table:table-cell table:style-name="表格13.A1" office:value-type="string">
            <text:p text:style-name="P10"><text:span text:style-name="T27">賣家</text:span>增加 <text:s/>→ <text:s/><text:span text:style-name="T28">商品</text:span>種類更豐富</text:p>
          </table:table-cell>
        </table:table-row>
        <table:table-row table:style-name="表格13.1">
          <table:table-cell table:style-name="表格13.A1" office:value-type="string">
            <text:p text:style-name="P10"><text:span text:style-name="T28">商品</text:span>豐富 <text:s/>→ <text:s/>吸引更多<text:span text:style-name="T1">買家</text:span></text:p>
          </table:table-cell>
        </table:table-row>
        <table:table-row table:style-name="表格13.1">
          <table:table-cell table:style-name="表格13.A1" office:value-type="string">
            <text:p text:style-name="P10">▸ 這個循環不斷強化，形成「競爭護城河」，後進者很難打破</text:p>
          </table:table-cell>
        </table:table-row>
      </table:table>
      <text:p text:style-name="P7"><text:soft-page-break/></text:p>
      <text:p text:style-name="P22">💡 考試重點：網路效應是電商平台「贏家通吃」的主要原因，規模越大優勢越難撼動。</text:p>
      <text:p text:style-name="P7"/>
      <text:h text:style-name="P5" text:outline-level="1">🔄 五、C2B — 消費者對企業</text:h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0"><text:span text:style-name="T16">全名： <text:s/></text:span><text:span text:style-name="T17">Consumer to Business</text:span></text:p>
          </table:table-cell>
        </table:table-row>
        <table:table-row table:style-name="表格14.1">
          <table:table-cell table:style-name="表格14.A1" office:value-type="string">
            <text:p text:style-name="P20"><text:span text:style-name="T16">白話： <text:s/></text:span><text:span text:style-name="T17">由消費者主動提出需求，讓企業互相競爭來服務消費者</text:span></text:p>
          </table:table-cell>
        </table:table-row>
      </table:table>
      <text:p text:style-name="P7"/>
      <text:p text:style-name="P21">對比傳統 B2C 模式：</text:p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7">B2C（傳統）</text:p>
          </table:table-cell>
          <table:table-cell table:style-name="表格15.B1" office:value-type="string">
            <text:p text:style-name="P18">企業決定商品與價格 → 消費者選擇要不要買 例：momo 定價 NT$9,999 賣手機給你</text:p>
          </table:table-cell>
        </table:table-row>
        <table:table-row table:style-name="表格15.1">
          <table:table-cell table:style-name="表格15.A1" office:value-type="string">
            <text:p text:style-name="P23">C2B（反轉）</text:p>
          </table:table-cell>
          <table:table-cell table:style-name="表格15.B2" office:value-type="string">
            <text:p text:style-name="P18"><text:span text:style-name="T29">消費者提出需求與條件 → 企業搶著滿足</text:span> 例：1,000 人揪團喊價 → 廠商降價搶訂單</text:p>
          </table:table-cell>
        </table:table-row>
      </table:table>
      <text:p text:style-name="P7"/>
      <text:p text:style-name="P21">📌 C2B 的實際應用</text:p>
      <text:list text:continue-numbering="true" text:style-name="WWNum2">
        <text:list-item>
          <text:p text:style-name="P9"><text:span text:style-name="T30">網路團購</text:span>：消費者集結成大批訂單，逼廠商給出最低價</text:p>
        </text:list-item>
        <text:list-item>
          <text:p text:style-name="P9"><text:span text:style-name="T30">客製化商品</text:span>：消費者先設計規格（顏色、材質、尺寸），廠商再生產</text:p>
        </text:list-item>
        <text:list-item>
          <text:p text:style-name="P9">個人才能接案平台：消費者（雇主）提出需求，接案者搶著投標</text:p>
        </text:list-item>
      </text:list>
      <text:p text:style-name="P7"/>
      <text:h text:style-name="P5" text:outline-level="1">⬇️ 六、反向拍賣（Reverse Auction）</text:h>
      <text:p text:style-name="P6">反向拍賣是 C2B 模式的重要應用，它讓「價格決定權」從賣方轉移到買方。</text:p>
      <text:p text:style-name="P24"/>
      <table:table table:name="表格16" table:style-name="表格16">
        <table:table-column table:style-name="表格16.A"/>
        <table:table-column table:style-name="表格16.B"/>
        <table:table-row table:style-name="表格16.1">
          <table:table-cell table:style-name="表格16.A1" office:value-type="string">
            <text:p text:style-name="P17">正向拍賣（傳統）</text:p>
          </table:table-cell>
          <table:table-cell table:style-name="表格16.B1" office:value-type="string">
            <text:p text:style-name="P18"><text:span text:style-name="T31">買家互相出價</text:span>，<text:span text:style-name="T32">價格越喊越高</text:span> 例：藝術品拍賣、Yahoo 拍賣 → NT$100 → $200 → $300</text:p>
          </table:table-cell>
        </table:table-row>
        <table:table-row table:style-name="表格16.1">
          <table:table-cell table:style-name="表格16.A1" office:value-type="string">
            <text:p text:style-name="P17">反向拍賣（逆向）</text:p>
          </table:table-cell>
          <table:table-cell table:style-name="表格16.B2" office:value-type="string">
            <text:p text:style-name="P18"><text:span text:style-name="T33">賣家（供應商）互相降價搶標</text:span> 買方說：我要做一個網站，預算 NT$30,000 → 廠商 A 報 $28,000、廠商 B 報 $25,000 →<text:span text:style-name="T34"> </text:span><text:span text:style-name="T35">最低價得標</text:span></text:p>
          </table:table-cell>
        </table:table-row>
      </table:table>
      <text:p text:style-name="P7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0">→ 反向拍賣讓採購方獲得最低價，常見於 B2B 採購、政府標案、工程發包。</text:p>
          </table:table-cell>
        </table:table-row>
      </table:table>
      <text:p text:style-name="P7"/>
      <text:h text:style-name="P5" text:outline-level="1">🔑 七、KSF — 關鍵成功因素</text:h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0"><text:span text:style-name="T16">全名： <text:s/></text:span><text:span text:style-name="T17">Key Success Factor</text:span></text:p>
          </table:table-cell>
        </table:table-row>
        <table:table-row table:style-name="表格18.1">
          <table:table-cell table:style-name="表格18.A1" office:value-type="string">
            <text:p text:style-name="P20"><text:span text:style-name="T16">白話： <text:s/></text:span><text:span text:style-name="T17">在評估一個電商平台或企業時，決定其成敗的最關鍵要素</text:span></text:p>
          </table:table-cell>
        </table:table-row>
      </table:table>
      <text:p text:style-name="P7"/>
      <text:p text:style-name="P6">不同產業、不同平台的 KSF 各有側重：</text:p>
      <table:table table:name="表格19" table:style-name="表格19">
        <table:table-column table:style-name="表格19.A"/>
        <table:table-column table:style-name="表格19.B"/>
        <table:table-row table:style-name="表格19.1">
          <table:table-cell table:style-name="表格19.A1" office:value-type="string">
            <text:p text:style-name="P17">麥當勞</text:p>
          </table:table-cell>
          <table:table-cell table:style-name="表格19.B1" office:value-type="string">
            <text:p text:style-name="P18">出餐速度快、品質一致、據點密度高</text:p>
          </table:table-cell>
        </table:table-row>
        <text:soft-page-break/>
        <table:table-row table:style-name="表格19.1">
          <table:table-cell table:style-name="表格19.A1" office:value-type="string">
            <text:p text:style-name="P17">蝦皮</text:p>
          </table:table-cell>
          <table:table-cell table:style-name="表格19.B2" office:value-type="string">
            <text:p text:style-name="P18">物流速度快、商品種類多、優惠活動吸引力強</text:p>
          </table:table-cell>
        </table:table-row>
        <table:table-row table:style-name="表格19.1">
          <table:table-cell table:style-name="表格19.A1" office:value-type="string">
            <text:p text:style-name="P17">Uber Eats</text:p>
          </table:table-cell>
          <table:table-cell table:style-name="表格19.B3" office:value-type="string">
            <text:p text:style-name="P18">外送時間短、餐廳選擇多、介面操作順暢</text:p>
          </table:table-cell>
        </table:table-row>
        <table:table-row table:style-name="表格19.1">
          <table:table-cell table:style-name="表格19.A1" office:value-type="string">
            <text:p text:style-name="P17">電商平台通用</text:p>
          </table:table-cell>
          <table:table-cell table:style-name="表格19.B4" office:value-type="string">
            <text:p text:style-name="P18">信任機制、金流安全、物流體驗、商品豐富度</text:p>
          </table:table-cell>
        </table:table-row>
      </table:table>
      <text:p text:style-name="P7"/>
      <text:p text:style-name="P22">💡 考試時若被問到某平台的 KSF，答題方向：從顧客痛點出發，分析平台如何解決它。</text:p>
      <text:p text:style-name="P7"/>
      <text:h text:style-name="P5" text:outline-level="1">📋 八、考試懶人包總整理</text:h>
      <text:p text:style-name="P6">把所有概念一張表搞定：</text:p>
      <text:p text:style-name="P7"/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25">概念</text:p>
          </table:table-cell>
          <table:table-cell table:style-name="表格20.A1" office:value-type="string">
            <text:p text:style-name="P25">白話定義</text:p>
          </table:table-cell>
          <table:table-cell table:style-name="表格20.A1" office:value-type="string">
            <text:p text:style-name="P25">蝦皮舉例</text:p>
          </table:table-cell>
        </table:table-row>
        <table:table-row table:style-name="表格20.1">
          <table:table-cell table:style-name="表格20.A2" office:value-type="string">
            <text:p text:style-name="P26">Porter 價值鏈</text:p>
          </table:table-cell>
          <table:table-cell table:style-name="表格20.B2" office:value-type="string">
            <text:p text:style-name="P27">分析企業創造價值的流程：主要活動（進貨→營運→出貨→行銷→售後）+ 支援活動</text:p>
          </table:table-cell>
          <table:table-cell table:style-name="表格20.C2" office:value-type="string">
            <text:p text:style-name="P27">蝦皮從進貨倉儲到退換貨，每個環節都在增加服務價值</text:p>
          </table:table-cell>
        </table:table-row>
        <table:table-row table:style-name="表格20.1">
          <table:table-cell table:style-name="表格20.A3" office:value-type="string">
            <text:p text:style-name="P26">SIS 策略資訊系統</text:p>
          </table:table-cell>
          <table:table-cell table:style-name="表格20.B3" office:value-type="string">
            <text:p text:style-name="P27">用資訊技術建立競爭優勢，讓對手難以模仿</text:p>
          </table:table-cell>
          <table:table-cell table:style-name="表格20.C3" office:value-type="string">
            <text:p text:style-name="P27">蝦皮 APP + 智慧推薦 + 蝦皮支付，整套生態圈難以複製</text:p>
          </table:table-cell>
        </table:table-row>
        <table:table-row table:style-name="表格20.1">
          <table:table-cell table:style-name="表格20.A2" office:value-type="string">
            <text:p text:style-name="P26">TCT 交易成本理論</text:p>
          </table:table-cell>
          <table:table-cell table:style-name="表格20.B4" office:value-type="string">
            <text:p text:style-name="P27">透過平台降低搜尋、比價、信任、協調等隱性成本</text:p>
          </table:table-cell>
          <table:table-cell table:style-name="表格20.C4" office:value-type="string">
            <text:p text:style-name="P27">擔保付款機制降低詐騙風險；搜尋功能降低比價時間</text:p>
          </table:table-cell>
        </table:table-row>
        <table:table-row table:style-name="表格20.1">
          <table:table-cell table:style-name="表格20.A3" office:value-type="string">
            <text:p text:style-name="P26">網路效應</text:p>
          </table:table-cell>
          <table:table-cell table:style-name="表格20.B5" office:value-type="string">
            <text:p text:style-name="P27">用戶越多平台越有價值，形成正向循環與競爭護城河</text:p>
          </table:table-cell>
          <table:table-cell table:style-name="表格20.C5" office:value-type="string">
            <text:p text:style-name="P27">買賣家相互吸引，蝦皮規模越大，新競爭者越難進入</text:p>
          </table:table-cell>
        </table:table-row>
        <table:table-row table:style-name="表格20.1">
          <table:table-cell table:style-name="表格20.A2" office:value-type="string">
            <text:p text:style-name="P26">C2B</text:p>
          </table:table-cell>
          <table:table-cell table:style-name="表格20.B6" office:value-type="string">
            <text:p text:style-name="P27">消費者主導需求，企業競爭服務</text:p>
          </table:table-cell>
          <table:table-cell table:style-name="表格20.C6" office:value-type="string">
            <text:p text:style-name="P27">千人團購集結需求，廠商主動降價搶單</text:p>
          </table:table-cell>
        </table:table-row>
        <table:table-row table:style-name="表格20.1">
          <table:table-cell table:style-name="表格20.A3" office:value-type="string">
            <text:p text:style-name="P26">反向拍賣</text:p>
          </table:table-cell>
          <table:table-cell table:style-name="表格20.B7" office:value-type="string">
            <text:p text:style-name="P27">供應商競相降價爭取合約，買方獲得最低成本</text:p>
          </table:table-cell>
          <table:table-cell table:style-name="表格20.C7" office:value-type="string">
            <text:p text:style-name="P27">政府採購招標：廠商搶著報最低價得標</text:p>
          </table:table-cell>
        </table:table-row>
        <table:table-row table:style-name="表格20.1">
          <table:table-cell table:style-name="表格20.A2" office:value-type="string">
            <text:p text:style-name="P26">KSF 關鍵成功因素</text:p>
          </table:table-cell>
          <table:table-cell table:style-name="表格20.B8" office:value-type="string">
            <text:p text:style-name="P27">決定特定平台或企業成敗的核心要素</text:p>
          </table:table-cell>
          <table:table-cell table:style-name="表格20.C8" office:value-type="string">
            <text:p text:style-name="P27">蝦皮 KSF：物流速度、商品廣度、促銷力度</text:p>
          </table:table-cell>
        </table:table-row>
      </table:table>
      <text:p text:style-name="P7"/>
      <text:h text:style-name="P5" text:outline-level="1">🧠 九、最強記憶口訣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0">價值鏈做流程，SIS 搶市場，</text:p>
          </table:table-cell>
        </table:table-row>
        <table:table-row table:style-name="表格21.1">
          <table:table-cell table:style-name="表格21.A1" office:value-type="string">
            <text:p text:style-name="P10">TCT 降成本，網效靠人多，</text:p>
          </table:table-cell>
        </table:table-row>
        <table:table-row table:style-name="表格21.1">
          <table:table-cell table:style-name="表格21.A1" office:value-type="string">
            <text:p text:style-name="P10">C2B 反過來，反拍供商殺價，</text:p>
          </table:table-cell>
        </table:table-row>
        <table:table-row table:style-name="表格21.1">
          <table:table-cell table:style-name="表格21.A1" office:value-type="string">
            <text:p text:style-name="P10">KSF 找關鍵，一句貫通全章：</text:p>
          </table:table-cell>
        </table:table-row>
        <table:table-row table:style-name="表格21.1">
          <table:table-cell table:style-name="表格21.A1" office:value-type="string">
            <text:p text:style-name="P8">「資訊系統讓交易更快、更便宜、更有效率。」</text:p>
          </table:table-cell>
        </table:table-row>
      </table:table>
      <text:p text:style-name="P7"/>
      <text:h text:style-name="P5" text:outline-level="1">🛒 十、用「蝦皮」一次貫通所有概念</text:h>
      <text:p text:style-name="P6">把蝦皮套入所有概念，確認你真的懂了：</text:p>
      <text:p text:style-name="P7"/>
      <table:table table:name="表格22" table:style-name="表格22">
        <table:table-column table:style-name="表格22.A"/>
        <table:table-column table:style-name="表格22.B"/>
        <text:soft-page-break/>
        <table:table-row table:style-name="表格22.1">
          <table:table-cell table:style-name="表格22.A1" office:value-type="string">
            <text:p text:style-name="P17">Porter 價值鏈</text:p>
          </table:table-cell>
          <table:table-cell table:style-name="表格22.B1" office:value-type="string">
            <text:p text:style-name="P18">進貨→倉庫管理→店到店物流→廣告優惠→客服退貨，每一步都在增加顧客體驗價值</text:p>
          </table:table-cell>
        </table:table-row>
        <table:table-row table:style-name="表格22.1">
          <table:table-cell table:style-name="表格22.A1" office:value-type="string">
            <text:p text:style-name="P17">SIS 策略資訊系統</text:p>
          </table:table-cell>
          <table:table-cell table:style-name="表格22.B2" office:value-type="string">
            <text:p text:style-name="P18">蝦皮 APP + AI 推薦 + 蝦皮支付 + 蝦皮物流，整體生態系就是競爭壁壘</text:p>
          </table:table-cell>
        </table:table-row>
        <table:table-row table:style-name="表格22.1">
          <table:table-cell table:style-name="表格22.A1" office:value-type="string">
            <text:p text:style-name="P17">TCT 交易成本</text:p>
          </table:table-cell>
          <table:table-cell table:style-name="表格22.B3" office:value-type="string">
            <text:p text:style-name="P18">擔保付款降低信任成本；物流追蹤降低協調成本；評分系統降低搜尋成本</text:p>
          </table:table-cell>
        </table:table-row>
        <table:table-row table:style-name="表格22.1">
          <table:table-cell table:style-name="表格22.A1" office:value-type="string">
            <text:p text:style-name="P17">網路效應</text:p>
          </table:table-cell>
          <table:table-cell table:style-name="表格22.B4" office:value-type="string">
            <text:p text:style-name="P18">買家多→賣家多→商品多→買家更多，正向循環持續強化</text:p>
          </table:table-cell>
        </table:table-row>
        <table:table-row table:style-name="表格22.1">
          <table:table-cell table:style-name="表格22.A1" office:value-type="string">
            <text:p text:style-name="P17">C2B</text:p>
          </table:table-cell>
          <table:table-cell table:style-name="表格22.B5" office:value-type="string">
            <text:p text:style-name="P18">雙 11 集單活動讓消費者集體提需求，廠商搶著配合推出低價組合</text:p>
          </table:table-cell>
        </table:table-row>
        <table:table-row table:style-name="表格22.1">
          <table:table-cell table:style-name="表格22.A1" office:value-type="string">
            <text:p text:style-name="P17">KSF</text:p>
          </table:table-cell>
          <table:table-cell table:style-name="表格22.B6" office:value-type="string">
            <text:p text:style-name="P18">物流速度（蝦皮物流）、信任機制（擔保付款）、商品廣度（百萬賣家）</text:p>
          </table:table-cell>
        </table:table-row>
      </table:table>
      <text:p text:style-name="P7"/>
      <text:p text:style-name="P7"/>
      <text:p text:style-name="P28"/>
      <text:p text:style-name="P29">本筆記以新手友善的方式整理，所有概念均以蝦皮為例說明。</text:p>
      <text:p text:style-name="P30">祝考試順利 💪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1a2e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a1a2e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41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color="#888888" loext:opacity="100%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98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141cm" fo:border-left="none" fo:border-right="none" fo:border-top="none" fo:border-bottom="0.74pt solid #2e75b6"/>
    </style:style>
    <style:style style:name="MP2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bdd7ee" fo:border-bottom="none"/>
    </style:style>
    <style:style style:name="MT1" style:family="text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MT2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MT3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style style:name="MT4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📘 電子商務概論筆記</text:span><text:span text:style-name="MT2"> <text:s text:c="2"/>· <text:s text:c="2"/>Porter 價值鏈 · SIS · TCT · 網路效應 · C2B</text:span></text:p>
      </style:header>
      <style:footer>
        <text:p text:style-name="MP2"><text:span text:style-name="MT3">第 </text:span><text:span text:style-name="MT4"><text:page-number text:select-page="current">6</text:page-number></text:span><text:span text:style-name="MT3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7</meta:editing-cycles>
    <meta:creation-date>2026-05-14T14:13:56.162000000</meta:creation-date>
    <dc:date>2026-05-16T00:19:40.926027800</dc:date>
    <meta:generator>LibreOffice/26.2.3.2$Windows_X86_64 LibreOffice_project/70e089b17412e4cb7773e41413306b17a2328c34</meta:generator>
    <meta:editing-duration>PT8H19M20S</meta:editing-duration>
    <meta:document-statistic meta:table-count="22" meta:image-count="0" meta:object-count="0" meta:page-count="6" meta:paragraph-count="182" meta:word-count="2875" meta:character-count="3464" meta:non-whitespace-character-count="3213"/>
  </office:meta>
</office:document-meta>
</file>