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.00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4.941cm"/>
    </style:style>
    <style:style style:name="表格1.C" style:family="table-column">
      <style:table-column-properties style:column-width="4.232cm"/>
    </style:style>
    <style:style style:name="表格1.D" style:family="table-column">
      <style:table-column-properties style:column-width="4.23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1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.D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1.A4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1.A5" style:family="table-cell">
      <style:table-cell-properties fo:background-color="#fff0d6" fo:padding-left="0.265cm" fo:padding-right="0.265cm" fo:padding-top="0.141cm" fo:padding-bottom="0.141cm" fo:border="0.1pt solid #cccccc">
        <style:background-image/>
      </style:table-cell-properties>
    </style:style>
    <style:style style:name="表格2" style:family="table">
      <style:table-properties style:width="16.228cm" fo:margin-left="0.002cm" fo:margin-top="0cm" fo:margin-bottom="0cm" table:align="left" style:writing-mode="page"/>
    </style:style>
    <style:style style:name="表格2.A" style:family="table-column">
      <style:table-column-properties style:column-width="8.114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2.B1" style:family="table-cell">
      <style:table-cell-properties fo:background-color="#7b1010" fo:padding-left="0.265cm" fo:padding-right="0.265cm" fo:padding-top="0.141cm" fo:padding-bottom="0.141cm" fo:border="0.1pt solid #cccccc">
        <style:background-image/>
      </style:table-cell-properties>
    </style:style>
    <style:style style:name="表格2.A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6.228cm" fo:margin-left="0.002cm" fo:margin-top="0cm" fo:margin-bottom="0cm" table:align="left" style:writing-mode="page"/>
    </style:style>
    <style:style style:name="表格3.A" style:family="table-column">
      <style:table-column-properties style:column-width="3.528cm"/>
    </style:style>
    <style:style style:name="表格3.B" style:family="table-column">
      <style:table-column-properties style:column-width="6.3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3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3.C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228cm" fo:margin-left="0.002cm" fo:margin-top="0cm" fo:margin-bottom="0cm" table:align="left" style:writing-mode="page"/>
    </style:style>
    <style:style style:name="表格4.A" style:family="table-column">
      <style:table-column-properties style:column-width="8.114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4.B1" style:family="table-cell">
      <style:table-cell-properties fo:background-color="#7b1010" fo:padding-left="0.265cm" fo:padding-right="0.265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228cm" fo:margin-left="0.002cm" fo:margin-top="0cm" fo:margin-bottom="0cm" table:align="left" style:writing-mode="page"/>
    </style:style>
    <style:style style:name="表格5.A" style:family="table-column">
      <style:table-column-properties style:column-width="4.584cm"/>
    </style:style>
    <style:style style:name="表格5.B" style:family="table-column">
      <style:table-column-properties style:column-width="5.821cm"/>
    </style:style>
    <style:style style:name="表格5.C" style:family="table-column">
      <style:table-column-properties style:column-width="5.82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5.B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5.C1" style:family="table-cell">
      <style:table-cell-properties fo:background-color="#7a4200" fo:padding-left="0.265cm" fo:padding-right="0.265cm" fo:padding-top="0.141cm" fo:padding-bottom="0.141cm" fo:border="0.1pt solid #cccccc">
        <style:background-image/>
      </style:table-cell-properties>
    </style:style>
    <style:style style:name="表格5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5.B2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5.B3" style:family="table-cell">
      <style:table-cell-properties fo:background-color="#fdecea" fo:padding-left="0.265cm" fo:padding-right="0.265cm" fo:padding-top="0.141cm" fo:padding-bottom="0.141cm" fo:border="0.1pt solid #cccccc">
        <style:background-image/>
      </style:table-cell-properties>
    </style:style>
    <style:style style:name="表格5.B6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6" style:family="table">
      <style:table-properties style:width="16.228cm" fo:margin-left="0.002cm" fo:margin-top="0cm" fo:margin-bottom="0cm" table:align="left" style:writing-mode="page"/>
    </style:style>
    <style:style style:name="表格6.A" style:family="table-column">
      <style:table-column-properties style:column-width="8.11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6.B1" style:family="table-cell">
      <style:table-cell-properties fo:background-color="#444444" fo:padding-left="0.265cm" fo:padding-right="0.265cm" fo:padding-top="0.141cm" fo:padding-bottom="0.141cm" fo:border="0.1pt solid #cccccc">
        <style:background-image/>
      </style:table-cell-properties>
    </style:style>
    <style:style style:name="表格6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6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7" style:family="table">
      <style:table-properties style:width="16.228cm" fo:margin-left="0.002cm" fo:margin-top="0cm" fo:margin-bottom="0cm" table:align="left" style:writing-mode="page"/>
    </style:style>
    <style:style style:name="表格7.A" style:family="table-column">
      <style:table-column-properties style:column-width="2.115cm"/>
    </style:style>
    <style:style style:name="表格7.B" style:family="table-column">
      <style:table-column-properties style:column-width="4.941cm"/>
    </style:style>
    <style:style style:name="表格7.C" style:family="table-column">
      <style:table-column-properties style:column-width="4.586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7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7.D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7.A4" style:family="table-cell">
      <style:table-cell-properties fo:background-color="#fff0d6" fo:padding-left="0.265cm" fo:padding-right="0.265cm" fo:padding-top="0.141cm" fo:padding-bottom="0.141cm" fo:border="0.1pt solid #cccccc">
        <style:background-image/>
      </style:table-cell-properties>
    </style:style>
    <style:style style:name="表格7.A5" style:family="table-cell">
      <style:table-cell-properties fo:background-color="#ede0f8" fo:padding-left="0.265cm" fo:padding-right="0.265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228cm" fo:margin-left="0.002cm" fo:margin-top="0cm" fo:margin-bottom="0cm" table:align="left" style:writing-mode="page"/>
    </style:style>
    <style:style style:name="表格8.A" style:family="table-column">
      <style:table-column-properties style:column-width="4.233cm"/>
    </style:style>
    <style:style style:name="表格8.B" style:family="table-column">
      <style:table-column-properties style:column-width="4.937cm"/>
    </style:style>
    <style:style style:name="表格8.C" style:family="table-column">
      <style:table-column-properties style:column-width="7.057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8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8.C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8.A4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228cm" fo:margin-left="0.002cm" fo:margin-top="0cm" fo:margin-bottom="0cm" table:align="left" style:writing-mode="page"/>
    </style:style>
    <style:style style:name="表格9.A" style:family="table-column">
      <style:table-column-properties style:column-width="4.233cm"/>
    </style:style>
    <style:style style:name="表格9.B" style:family="table-column">
      <style:table-column-properties style:column-width="11.99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9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9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0" style:family="table">
      <style:table-properties style:width="16.228cm" fo:margin-left="0.002cm" fo:margin-top="0cm" fo:margin-bottom="0cm" table:align="left" style:writing-mode="page"/>
    </style:style>
    <style:style style:name="表格10.A" style:family="table-column">
      <style:table-column-properties style:column-width="8.114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10.B1" style:family="table-cell">
      <style:table-cell-properties fo:background-color="#7b1010" fo:padding-left="0.265cm" fo:padding-right="0.265cm" fo:padding-top="0.141cm" fo:padding-bottom="0.141cm" fo:border="0.1pt solid #cccccc">
        <style:background-image/>
      </style:table-cell-properties>
    </style:style>
    <style:style style:name="表格10.A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1" style:family="table">
      <style:table-properties style:width="16.228cm" fo:margin-left="0.002cm" fo:margin-top="0cm" fo:margin-bottom="0cm" table:align="left" style:writing-mode="page"/>
    </style:style>
    <style:style style:name="表格11.A" style:family="table-column">
      <style:table-column-properties style:column-width="4.937cm"/>
    </style:style>
    <style:style style:name="表格11.B" style:family="table-column">
      <style:table-column-properties style:column-width="11.2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1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1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" style:family="table">
      <style:table-properties style:width="16.228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3.528cm"/>
    </style:style>
    <style:style style:name="表格12.C" style:family="table-column">
      <style:table-column-properties style:column-width="11.64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2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2.C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表格12.5" style:family="table-row">
      <style:table-row-properties style:min-row-height="0.803cm" fo:keep-together="auto"/>
    </style:style>
    <style:style style:name="表格13" style:family="table">
      <style:table-properties style:width="16.228cm" fo:margin-left="0.002cm" fo:margin-top="0cm" fo:margin-bottom="0cm" table:align="left" style:writing-mode="page"/>
    </style:style>
    <style:style style:name="表格13.A" style:family="table-column">
      <style:table-column-properties style:column-width="3.175cm"/>
    </style:style>
    <style:style style:name="表格13.B" style:family="table-column">
      <style:table-column-properties style:column-width="3.261cm"/>
    </style:style>
    <style:style style:name="表格13.C" style:family="table-column">
      <style:table-column-properties style:column-width="3.263cm"/>
    </style:style>
    <style:style style:name="表格13.E" style:family="table-column">
      <style:table-column-properties style:column-width="3.26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3.C1" style:family="table-cell">
      <style:table-cell-properties fo:background-color="#145a5a" fo:padding-left="0.265cm" fo:padding-right="0.265cm" fo:padding-top="0.141cm" fo:padding-bottom="0.141cm" fo:border="0.1pt solid #cccccc">
        <style:background-image/>
      </style:table-cell-properties>
    </style:style>
    <style:style style:name="表格13.D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13.E1" style:family="table-cell">
      <style:table-cell-properties fo:background-color="#7a4200" fo:padding-left="0.265cm" fo:padding-right="0.265cm" fo:padding-top="0.141cm" fo:padding-bottom="0.141cm" fo:border="0.1pt solid #cccccc">
        <style:background-image/>
      </style:table-cell-properties>
    </style:style>
    <style:style style:name="表格13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3.C2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13.D2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13.E2" style:family="table-cell">
      <style:table-cell-properties fo:background-color="#fff0d6" fo:padding-left="0.265cm" fo:padding-right="0.265cm" fo:padding-top="0.141cm" fo:padding-bottom="0.141cm" fo:border="0.1pt solid #cccccc">
        <style:background-image/>
      </style:table-cell-properties>
    </style:style>
    <style:style style:name="表格14" style:family="table">
      <style:table-properties style:width="16.228cm" fo:margin-left="0.002cm" fo:margin-top="0cm" fo:margin-bottom="0cm" table:align="left" style:writing-mode="page"/>
    </style:style>
    <style:style style:name="表格14.A" style:family="table-column">
      <style:table-column-properties style:column-width="2.82cm"/>
    </style:style>
    <style:style style:name="表格14.B" style:family="table-column">
      <style:table-column-properties style:column-width="6.705cm"/>
    </style:style>
    <style:style style:name="表格14.C" style:family="table-column">
      <style:table-column-properties style:column-width="6.703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4.B1" style:family="table-cell">
      <style:table-cell-properties fo:background-color="#1d6b3e" fo:padding-left="0.265cm" fo:padding-right="0.265cm" fo:padding-top="0.141cm" fo:padding-bottom="0.141cm" fo:border="0.1pt solid #cccccc">
        <style:background-image/>
      </style:table-cell-properties>
    </style:style>
    <style:style style:name="表格14.C1" style:family="table-cell">
      <style:table-cell-properties fo:background-color="#7b1010" fo:padding-left="0.265cm" fo:padding-right="0.265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d0dff5" fo:padding-left="0.265cm" fo:padding-right="0.265cm" fo:padding-top="0.141cm" fo:padding-bottom="0.141cm" fo:border="0.1pt solid #cccccc">
        <style:background-image/>
      </style:table-cell-properties>
    </style:style>
    <style:style style:name="表格14.B2" style:family="table-cell">
      <style:table-cell-properties fo:background-color="#d5f0df" fo:padding-left="0.265cm" fo:padding-right="0.265cm" fo:padding-top="0.141cm" fo:padding-bottom="0.141cm" fo:border="0.1pt solid #cccccc">
        <style:background-image/>
      </style:table-cell-properties>
    </style:style>
    <style:style style:name="表格14.C2" style:family="table-cell">
      <style:table-cell-properties fo:background-color="#fdecea" fo:padding-left="0.265cm" fo:padding-right="0.265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c8eaea" fo:padding-left="0.265cm" fo:padding-right="0.265cm" fo:padding-top="0.141cm" fo:padding-bottom="0.141cm" fo:border="0.1pt solid #cccccc">
        <style:background-image/>
      </style:table-cell-properties>
    </style:style>
    <style:style style:name="表格14.A5" style:family="table-cell">
      <style:table-cell-properties fo:background-color="#fff0d6" fo:padding-left="0.265cm" fo:padding-right="0.265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228cm" fo:margin-left="0.002cm" fo:margin-top="0cm" fo:margin-bottom="0cm" table:align="left" style:writing-mode="page"/>
    </style:style>
    <style:style style:name="表格15.A" style:family="table-column">
      <style:table-column-properties style:column-width="4.937cm"/>
    </style:style>
    <style:style style:name="表格15.B" style:family="table-column">
      <style:table-column-properties style:column-width="11.2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1b3a6b" fo:padding-left="0.265cm" fo:padding-right="0.265cm" fo:padding-top="0.141cm" fo:padding-bottom="0.141cm" fo:border="0.1pt solid #cccccc">
        <style:background-image/>
      </style:table-cell-properties>
    </style:style>
    <style:style style:name="表格15.A2" style:family="table-cell">
      <style:table-cell-properties fo:background-color="#eef3fb" fo:padding-left="0.265cm" fo:padding-right="0.265cm" fo:padding-top="0.141cm" fo:padding-bottom="0.141cm" fo:border="0.1pt solid #cccccc">
        <style:background-image/>
      </style:table-cell-properties>
    </style:style>
    <style:style style:name="表格15.B2" style:family="table-cell">
      <style:table-cell-properties fo:background-color="#ffffff" fo:padding-left="0.265cm" fo:padding-right="0.265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cm" fo:margin-bottom="2.822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fo:color="#1b3a6b" loext:opacity="100%" style:font-name="Arial" fo:font-size="34pt" fo:font-style="normal" fo:font-weight="bold" style:font-name-asian="Arial2" style:font-size-asian="34pt" style:font-style-asian="normal" style:font-weight-asian="bold" style:font-name-complex="Arial2" style:font-size-complex="34pt" style:font-style-complex="normal" style:font-weight-complex="bold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fo:color="#2e5fa3" loext:opacity="100%" style:font-name="Arial" fo:font-size="26pt" fo:font-style="normal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padding-left="0cm" fo:padding-right="0cm" fo:padding-top="0cm" fo:padding-bottom="0.071cm" fo:border-left="none" fo:border-right="none" fo:border-top="none" fo:border-bottom="0.6pt solid #2e5fa3"/>
      <style:text-properties fo:color="#444444" loext:opacity="100%" style:font-name="Arial" fo:font-size="11pt" fo:font-style="italic" fo:font-weight="normal" style:font-name-asian="Arial2" style:font-size-asian="11pt" style:font-style-asian="italic" style:font-weight-asian="normal" style:font-name-complex="Arial2" style:font-size-complex="11pt" style:font-style-complex="italic" style:font-weight-complex="normal"/>
    </style:style>
    <style:style style:name="P5" style:family="paragraph" style:parent-style-name="Standard">
      <style:paragraph-properties fo:margin-top="0cm" fo:margin-bottom="0.706cm" style:contextual-spacing="false"/>
    </style:style>
    <style:style style:name="P6" style:family="paragraph" style:parent-style-name="Standard">
      <loext:graphic-properties draw:fill="solid" draw:fill-color="#2e5fa3"/>
      <style:paragraph-properties fo:margin-left="0.282cm" fo:margin-right="0.282cm" fo:margin-top="0.212cm" fo:margin-bottom="0cm" style:contextual-spacing="false" fo:background-color="#2e5fa3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7" style:family="paragraph" style:parent-style-name="Standard">
      <loext:graphic-properties draw:fill="solid" draw:fill-color="#eef3fb"/>
      <style:paragraph-properties fo:margin-left="0.282cm" fo:margin-right="0.282cm" fo:margin-top="0cm" fo:margin-bottom="0cm" style:contextual-spacing="false" fo:background-color="#eef3fb"/>
      <style:text-properties fo:color="#1a1a1a" loext:opacity="100%" style:font-name="Arial" fo:font-size="10pt" style:font-name-asian="Arial2" style:font-size-asian="10pt" style:font-name-complex="Arial2" style:font-size-complex="10pt"/>
    </style:style>
    <style:style style:name="P8" style:family="paragraph" style:parent-style-name="Standard">
      <loext:graphic-properties draw:fill="solid" draw:fill-color="#eef3fb"/>
      <style:paragraph-properties fo:margin-left="0.282cm" fo:margin-right="0.282cm" fo:margin-top="0cm" fo:margin-bottom="0.176cm" style:contextual-spacing="false" fo:background-color="#eef3fb"/>
      <style:text-properties fo:color="#1a1a1a" loext:opacity="100%" style:font-name="Arial" fo:font-size="10pt" style:font-name-asian="Arial2" style:font-size-asian="10pt" style:font-name-complex="Arial2" style:font-size-complex="10pt"/>
    </style:style>
    <style:style style:name="P9" style:family="paragraph" style:parent-style-name="Standard">
      <loext:graphic-properties draw:fill="solid" draw:fill-color="#1b3a6b"/>
      <style:paragraph-properties fo:margin-left="0cm" fo:margin-top="0cm" fo:margin-bottom="0.247cm" style:contextual-spacing="false" fo:break-before="page" fo:background-color="#1b3a6b"/>
      <style:text-properties fo:color="#ffffff" loext:opacity="100%" style:font-name="Arial" fo:font-size="19pt" fo:font-weight="bold" style:font-name-asian="Arial2" style:font-size-asian="19pt" style:font-weight-asian="bold" style:font-name-complex="Arial2" style:font-size-complex="19pt" style:font-weight-complex="bold"/>
    </style:style>
    <style:style style:name="P10" style:family="paragraph" style:parent-style-name="Standard">
      <style:paragraph-properties fo:margin-top="0cm" fo:margin-bottom="0.141cm" style:contextual-spacing="false"/>
    </style:style>
    <style:style style:name="P11" style:family="paragraph" style:parent-style-name="Standard">
      <style:paragraph-properties fo:margin-top="0.071cm" fo:margin-bottom="0.106cm" style:contextual-spacing="false"/>
      <style:text-properties fo:color="#1a1a1a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.071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17" style:family="paragraph" style:parent-style-name="Standard">
      <style:paragraph-properties fo:margin-top="0cm" fo:margin-bottom="0.106cm" style:contextual-spacing="false"/>
    </style:style>
    <style:style style:name="P18" style:family="paragraph" style:parent-style-name="Standard">
      <loext:graphic-properties draw:fill="solid" draw:fill-color="#7b1010"/>
      <style:paragraph-properties fo:margin-left="0.282cm" fo:margin-right="0.282cm" fo:margin-top="0.212cm" fo:margin-bottom="0cm" style:contextual-spacing="false" fo:background-color="#7b1010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9" style:family="paragraph" style:parent-style-name="Standard">
      <loext:graphic-properties draw:fill="solid" draw:fill-color="#fdecea"/>
      <style:paragraph-properties fo:margin-left="0.282cm" fo:margin-right="0.282cm" fo:margin-top="0cm" fo:margin-bottom="0cm" style:contextual-spacing="false" fo:background-color="#fdecea"/>
      <style:text-properties fo:color="#1a1a1a" loext:opacity="100%" style:font-name="Arial" fo:font-size="10pt" style:font-name-asian="Arial2" style:font-size-asian="10pt" style:font-name-complex="Arial2" style:font-size-complex="10pt"/>
    </style:style>
    <style:style style:name="P20" style:family="paragraph" style:parent-style-name="Standard">
      <loext:graphic-properties draw:fill="solid" draw:fill-color="#fdecea"/>
      <style:paragraph-properties fo:margin-left="0.282cm" fo:margin-right="0.282cm" fo:margin-top="0cm" fo:margin-bottom="0.176cm" style:contextual-spacing="false" fo:background-color="#fdecea"/>
      <style:text-properties fo:color="#1a1a1a" loext:opacity="100%" style:font-name="Arial" fo:font-size="10pt" style:font-name-asian="Arial2" style:font-size-asian="10pt" style:font-name-complex="Arial2" style:font-size-complex="10pt"/>
    </style:style>
    <style:style style:name="P21" style:family="paragraph" style:parent-style-name="Standard">
      <style:paragraph-properties fo:margin-top="0.494cm" fo:margin-bottom="0.176cm" style:contextual-spacing="false" fo:padding-left="0cm" fo:padding-right="0cm" fo:padding-top="0cm" fo:padding-bottom="0.071cm" fo:border-left="none" fo:border-right="none" fo:border-top="none" fo:border-bottom="0.34pt solid #2e5fa3"/>
      <style:text-properties fo:color="#1b3a6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2" style:family="paragraph" style:parent-style-name="Standard">
      <loext:graphic-properties draw:fill="solid" draw:fill-color="#1e1e2e"/>
      <style:paragraph-properties fo:margin-left="0.353cm" fo:margin-right="0.353cm" fo:margin-top="0cm" fo:margin-bottom="0cm" style:contextual-spacing="false" fo:background-color="#1e1e2e"/>
      <style:text-properties fo:color="#a6e3a1" loext:opacity="100%" style:font-name="Courier New" fo:font-size="9pt" style:font-name-asian="Courier New1" style:font-size-asian="9pt" style:font-name-complex="Courier New1" style:font-size-complex="9pt"/>
    </style:style>
    <style:style style:name="P23" style:family="paragraph" style:parent-style-name="Standard">
      <loext:graphic-properties draw:fill="solid" draw:fill-color="#1e1e2e"/>
      <style:paragraph-properties fo:margin-left="0.353cm" fo:margin-right="0.353cm" fo:margin-top="0cm" fo:margin-bottom="0.141cm" style:contextual-spacing="false" fo:background-color="#1e1e2e"/>
      <style:text-properties fo:color="#a6e3a1" loext:opacity="100%" style:font-name="Courier New" fo:font-size="9pt" style:font-name-asian="Courier New1" style:font-size-asian="9pt" style:font-name-complex="Courier New1" style:font-size-complex="9pt"/>
    </style:style>
    <style:style style:name="P24" style:family="paragraph" style:parent-style-name="Standard">
      <loext:graphic-properties draw:fill="solid" draw:fill-color="#1e1e2e"/>
      <style:paragraph-properties fo:margin-left="0.353cm" fo:margin-right="0.353cm" fo:margin-top="0cm" fo:margin-bottom="0cm" style:contextual-spacing="false" fo:background-color="#1e1e2e"/>
    </style:style>
    <style:style style:name="P25" style:family="paragraph" style:parent-style-name="Standard">
      <style:paragraph-properties fo:margin-top="0.282cm" fo:margin-bottom="0.106cm" style:contextual-spacing="false"/>
      <style:text-properties fo:color="#2e5fa3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P26" style:family="paragraph" style:parent-style-name="Standard">
      <loext:graphic-properties draw:fill="solid" draw:fill-color="#fdecea"/>
      <style:paragraph-properties fo:margin-left="0.282cm" fo:margin-right="0.282cm" fo:margin-top="0cm" fo:margin-bottom="0cm" style:contextual-spacing="false" fo:background-color="#fdecea"/>
    </style:style>
    <style:style style:name="P27" style:family="paragraph" style:parent-style-name="Standard">
      <style:paragraph-properties fo:margin-top="0.071cm" fo:margin-bottom="0.106cm" style:contextual-spacing="false"/>
    </style:style>
    <style:style style:name="P28" style:family="paragraph" style:parent-style-name="Standard">
      <style:paragraph-properties fo:margin-top="0cm" fo:margin-bottom="0cm" style:contextual-spacing="false" fo:text-align="left" style:justify-single-word="false"/>
      <style:text-properties fo:color="#18ffff" loext:opacity="100%" style:font-name="Arial" fo:font-size="10pt" fo:font-style="italic" fo:font-weight="bold" fo:background-color="#d500f9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P29" style:family="paragraph" style:parent-style-name="Standard">
      <style:paragraph-properties fo:margin-top="0cm" fo:margin-bottom="0cm" style:contextual-spacing="false" fo:text-align="left" style:justify-single-word="false"/>
      <style:text-properties fo:color="#ffff00" loext:opacity="100%" style:font-name="Arial" fo:font-size="10pt" fo:font-style="normal" fo:font-weight="bold" fo:background-color="#ff910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style:contextual-spacing="false" fo:text-align="left" style:justify-single-word="false"/>
      <style:text-properties fo:color="#18ffff" loext:opacity="100%" style:font-name="Arial" fo:font-size="10pt" fo:font-style="normal" fo:font-weight="bold" fo:background-color="#d500f9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1" style:family="paragraph" style:parent-style-name="Standard">
      <loext:graphic-properties draw:fill="solid" draw:fill-color="#1e1e2e"/>
      <style:paragraph-properties fo:margin-left="0.353cm" fo:margin-right="0.353cm" fo:margin-top="0cm" fo:margin-bottom="0cm" style:contextual-spacing="false" fo:background-color="#1e1e2e"/>
      <style:text-properties fo:color="#a6e3a1" loext:opacity="100%" style:font-name="Courier New" fo:font-size="9pt" fo:background-color="#ff3d00" style:font-name-asian="Courier New1" style:font-size-asian="9pt" style:font-name-complex="Courier New1" style:font-size-complex="9pt"/>
    </style:style>
    <style:style style:name="P32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10pt" fo:font-style="normal" fo:font-weight="bold" fo:background-color="#ffff0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style:contextual-spacing="false" fo:text-align="left" style:justify-single-word="false"/>
      <style:text-properties fo:color="#64ffda" loext:opacity="100%" style:font-name="Arial" fo:font-size="10pt" fo:font-style="normal" fo:font-weight="bold" fo:background-color="#004d4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1a1a1a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10pt" fo:font-style="normal" fo:font-weight="bold" fo:background-color="#ffd74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6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10pt" fo:font-style="normal" fo:font-weight="normal" fo:background-color="#ffff00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37" style:family="paragraph" style:parent-style-name="Standard">
      <loext:graphic-properties draw:fill="solid" draw:fill-color="#eef3fb"/>
      <style:paragraph-properties fo:margin-left="0.282cm" fo:margin-right="0.282cm" fo:margin-top="0cm" fo:margin-bottom="0cm" style:contextual-spacing="false" fo:background-color="#eef3fb"/>
    </style:style>
    <style:style style:name="P38" style:family="paragraph" style:parent-style-name="Standard">
      <loext:graphic-properties draw:fill="solid" draw:fill-color="#1d6b3e"/>
      <style:paragraph-properties fo:margin-left="0.282cm" fo:margin-right="0.282cm" fo:margin-top="0.212cm" fo:margin-bottom="0cm" style:contextual-spacing="false" fo:background-color="#1d6b3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loext:graphic-properties draw:fill="solid" draw:fill-color="#d5f0df"/>
      <style:paragraph-properties fo:margin-left="0.282cm" fo:margin-right="0.282cm" fo:margin-top="0cm" fo:margin-bottom="0cm" style:contextual-spacing="false" fo:background-color="#d5f0df"/>
      <style:text-properties fo:color="#1a1a1a" loext:opacity="100%" style:font-name="Arial" fo:font-size="10pt" style:font-name-asian="Arial2" style:font-size-asian="10pt" style:font-name-complex="Arial2" style:font-size-complex="10pt"/>
    </style:style>
    <style:style style:name="P40" style:family="paragraph" style:parent-style-name="Standard">
      <loext:graphic-properties draw:fill="solid" draw:fill-color="#d5f0df"/>
      <style:paragraph-properties fo:margin-left="0.282cm" fo:margin-right="0.282cm" fo:margin-top="0cm" fo:margin-bottom="0cm" style:contextual-spacing="false" fo:background-color="#d5f0df"/>
    </style:style>
    <style:style style:name="P41" style:family="paragraph" style:parent-style-name="Standard">
      <loext:graphic-properties draw:fill="solid" draw:fill-color="#d5f0df"/>
      <style:paragraph-properties fo:margin-left="0.282cm" fo:margin-right="0.282cm" fo:margin-top="0cm" fo:margin-bottom="0.176cm" style:contextual-spacing="false" fo:background-color="#d5f0df"/>
      <style:text-properties fo:color="#1a1a1a" loext:opacity="100%" style:font-name="Arial" fo:font-size="10pt" style:font-name-asian="Arial2" style:font-size-asian="10pt" style:font-name-complex="Arial2" style:font-size-complex="10pt"/>
    </style:style>
    <style:style style:name="P42" style:family="paragraph" style:parent-style-name="Standard">
      <style:paragraph-properties fo:margin-top="0cm" fo:margin-bottom="0cm" style:contextual-spacing="false" fo:text-align="left" style:justify-single-word="false"/>
      <style:text-properties fo:color="#2e5fa3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fo:color="#1a1a1a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color="#2e5fa3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3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5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6" style:family="text">
      <style:text-properties fo:font-weight="bold" fo:background-color="#ffd740" loext:char-shading-value="0" style:font-weight-asian="bold" style:font-weight-complex="bold"/>
    </style:style>
    <style:style style:name="T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" style:family="text">
      <style:text-properties fo:color="#ffea00" loext:opacity="100%" fo:font-weight="bold" fo:background-color="#ff9100" loext:char-shading-value="0" style:font-weight-asian="bold" style:font-weight-complex="bold"/>
    </style:style>
    <style:style style:name="T9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0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2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color="#ffea00" loext:opacity="100%" fo:font-weight="bold" style:font-weight-asian="bold" style:font-weight-complex="bold"/>
    </style:style>
    <style:style style:name="T15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6" style:family="text">
      <style:text-properties fo:background-color="#ffd740" loext:char-shading-value="0"/>
    </style:style>
    <style:style style:name="T17" style:family="text">
      <style:text-properties fo:color="#2e5fa3" loext:opacity="100%" style:font-name="Arial" fo:font-size="10pt" fo:font-style="normal" fo:font-weight="bold" fo:background-color="#ffff00" loext:char-shading-value="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8" style:family="text">
      <style:text-properties fo:color="#1a1a1a" loext:opacity="100%" style:font-name="Arial" fo:font-size="10pt" fo:font-style="normal" fo:font-weight="bold" fo:background-color="#ffff00" loext:char-shading-value="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9" style:family="text">
      <style:text-properties fo:color="#ffea00" loext:opacity="100%" style:font-name="Arial" fo:font-size="10pt" fo:font-style="normal" fo:font-weight="bold" fo:background-color="#3d5afe" loext:char-shading-value="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20" style:family="text">
      <style:text-properties fo:color="#18ffff" loext:opacity="100%" style:font-name="Arial" fo:font-size="10pt" fo:font-style="normal" fo:font-weight="bold" fo:background-color="#d500f9" loext:char-shading-value="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21" style:family="text">
      <style:text-properties fo:color="#64ffda" loext:opacity="100%" fo:font-weight="bold" fo:background-color="#311b92" loext:char-shading-value="0" style:font-weight-asian="bold" style:font-weight-complex="bold"/>
    </style:style>
    <style:style style:name="T22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23" style:family="text">
      <style:text-properties fo:color="#76ff03" loext:opacity="100%" fo:font-weight="bold" fo:background-color="#33691e" loext:char-shading-value="0" style:font-weight-asian="bold" style:font-weight-complex="bold"/>
    </style:style>
    <style:style style:name="T24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25" style:family="text">
      <style:text-properties fo:color="#ff3d00" loext:opacity="100%" style:font-name="Arial" fo:font-size="10pt" fo:font-style="normal" fo:font-weight="bold" fo:background-color="#64ffda" loext:char-shading-value="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26" style:family="text">
      <style:text-properties fo:color="#ffea00" loext:opacity="100%" fo:font-weight="bold" fo:background-color="#b71c1c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軟體開發方法論</text:p>
      <text:p text:style-name="P3">完整學習筆記</text:p>
      <text:p text:style-name="P4">瀑布模型 <text:s/>· <text:s/>雛型模型 <text:s/>· <text:s/>漸增模型 <text:s/>· <text:s/>敏捷開發 <text:s/>· <text:s/>Scrum / Kanban / XP / Lean</text:p>
      <text:p text:style-name="P5"/>
      <text:p text:style-name="P6"><text:s text:c="2"/>📌 <text:s/>重點整理</text:p>
      <text:p text:style-name="P7"><text:s text:c="2"/>本筆記基於完整的概念審查，補正原始資料中的錯誤與跳躍說明，</text:p>
      <text:p text:style-name="P8"><text:s text:c="2"/>適合公職考試、資訊管理相關科目複習使用。</text:p>
      <text:p text:style-name="Standard"/>
      <text:p text:style-name="P9"><text:s text:c="2"/>第一章：四大開發模型總覽</text:p>
      <text:p text:style-name="P10"/>
      <text:p text:style-name="P11">軟體工程中有四個正式的開發模型，都可能在考試中出現：</text:p>
      <text:p text:style-name="P1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3">模型</text:p>
          </table:table-cell>
          <table:table-cell table:style-name="表格1.A1" office:value-type="string">
            <text:p text:style-name="P13">核心概念</text:p>
          </table:table-cell>
          <table:table-cell table:style-name="表格1.A1" office:value-type="string">
            <text:p text:style-name="P13">最適合情境</text:p>
          </table:table-cell>
          <table:table-cell table:style-name="表格1.A1" office:value-type="string">
            <text:p text:style-name="P13">一句話記憶</text:p>
          </table:table-cell>
        </table:table-row>
        <table:table-row table:style-name="表格1.1">
          <table:table-cell table:style-name="表格1.A2" office:value-type="string">
            <text:p text:style-name="P14">瀑布 (Waterfall)</text:p>
          </table:table-cell>
          <table:table-cell table:style-name="表格1.B2" office:value-type="string">
            <text:p text:style-name="P15">線性階段式，一步做完才能進下一步</text:p>
          </table:table-cell>
          <table:table-cell table:style-name="表格1.B2" office:value-type="string">
            <text:p text:style-name="P15">需求穩定、大型企業系統</text:p>
          </table:table-cell>
          <table:table-cell table:style-name="表格1.D2" office:value-type="string">
            <text:p text:style-name="P16">一條河只往下流</text:p>
          </table:table-cell>
        </table:table-row>
        <table:table-row table:style-name="表格1.1">
          <table:table-cell table:style-name="表格1.A3" office:value-type="string">
            <text:p text:style-name="P14">雛型 (Prototype)</text:p>
          </table:table-cell>
          <table:table-cell table:style-name="表格1.B2" office:value-type="string">
            <text:p text:style-name="P15">先做快速原型→使用者回饋→修正</text:p>
          </table:table-cell>
          <table:table-cell table:style-name="表格1.B2" office:value-type="string">
            <text:p text:style-name="P15">需求不明確、UI 互動系統</text:p>
          </table:table-cell>
          <table:table-cell table:style-name="表格1.A3" office:value-type="string">
            <text:p text:style-name="P16">先畫草圖再蓋房子</text:p>
          </table:table-cell>
        </table:table-row>
        <table:table-row table:style-name="表格1.1">
          <table:table-cell table:style-name="表格1.A4" office:value-type="string">
            <text:p text:style-name="P14">漸增 (Incremental)</text:p>
          </table:table-cell>
          <table:table-cell table:style-name="表格1.B2" office:value-type="string">
            <text:p text:style-name="P15">分段開發，每段都有可運作的子系統，功能逐步增加</text:p>
          </table:table-cell>
          <table:table-cell table:style-name="表格1.B2" office:value-type="string">
            <text:p text:style-name="P15">需求複雜且可能持續擴充的系統</text:p>
          </table:table-cell>
          <table:table-cell table:style-name="表格1.A4" office:value-type="string">
            <text:p text:style-name="P16">蓋完一層才蓋下一層</text:p>
          </table:table-cell>
        </table:table-row>
        <table:table-row table:style-name="表格1.1">
          <table:table-cell table:style-name="表格1.A5" office:value-type="string">
            <text:p text:style-name="P14">敏捷 (Agile)</text:p>
          </table:table-cell>
          <table:table-cell table:style-name="表格1.B2" office:value-type="string">
            <text:p text:style-name="P15">短週期迭代 + 持續交付 + 回饋修正</text:p>
          </table:table-cell>
          <table:table-cell table:style-name="表格1.B2" office:value-type="string">
            <text:p text:style-name="P15">需求多變、快速交付導向的產品</text:p>
          </table:table-cell>
          <table:table-cell table:style-name="表格1.A5" office:value-type="string">
            <text:p text:style-name="P16">小步快跑、邊跑邊調整</text:p>
          </table:table-cell>
        </table:table-row>
      </table:table>
      <text:p text:style-name="P17"/>
      <text:p text:style-name="P18"><text:s text:c="2"/>⚠ <text:s/>觀念補正 / 注意事項</text:p>
      <text:p text:style-name="P19">⚠ <text:s/>「只有三大模型」是錯誤的說法！</text:p>
      <text:p text:style-name="P19"><text:s text:c="3"/>部分教材為了簡化教學，只列「瀑布、雛型、敏捷」，但這是教學省略，並非完整分類。</text:p>
      <text:p text:style-name="P19"><text:s text:c="3"/>漸增模型（Incremental）是正式存在的開發模型，出現時間比敏捷更早，</text:p>
      <text:p text:style-name="P20"><text:s text:c="3"/>在公職與資管考試中都可能單獨出題，不能省略。</text:p>
      <text:p text:style-name="P10"/>
      <text:p text:style-name="Standard"/>
      <text:p text:style-name="P9"><text:s text:c="2"/>第二章：瀑布模型（Waterfall）</text:p>
      <text:p text:style-name="P10"/>
      <text:p text:style-name="P21">2.1 核心概念</text:p>
      <text:p text:style-name="P11">瀑布模型是最早的軟體開發方法，流程如同瀑布一樣「只能向下流動」：每個階段必須完全完成，才能進入下一個階段，且原則上不允許回頭。</text:p>
      <text:p text:style-name="P12"/>
      <text:p text:style-name="P22">需求分析 <text:s/>→ <text:s/>系統設計 <text:s/>→ <text:s/>程式實作 <text:s/>→ <text:s/>整合測試 <text:s/>→ <text:s/>系統維護</text:p>
      <text:p text:style-name="P23">（Requirements） <text:s/>（Design） <text:s/>（Implementation） <text:s/>（Testing） <text:s/>（Maintenance）</text:p>
      <text:p text:style-name="P10"/>
      <text:p text:style-name="P21">2.2 特性、優缺點</text:p>
      <text:p text:style-name="P12"/>
      <table:table table:name="表格2" table:style-name="表格2">
        <table:table-column table:style-name="表格2.A" table:number-columns-repeated="2"/>
        <table:table-row table:style-name="表格2.1">
          <table:table-cell table:style-name="表格2.A1" office:value-type="string">
            <text:p text:style-name="P13">✅ <text:s/>優點</text:p>
          </table:table-cell>
          <table:table-cell table:style-name="表格2.B1" office:value-type="string">
            <text:p text:style-name="P13">❌ <text:s/>缺點</text:p>
          </table:table-cell>
        </table:table-row>
        <table:table-row table:style-name="表格2.1">
          <table:table-cell table:style-name="表格2.A2" office:value-type="string">
            <text:p text:style-name="P15">文件完整（每個階段都有正式文件） 管理簡單（進度容易追蹤） 適合需求穩定的大型系統</text:p>
          </table:table-cell>
          <table:table-cell table:style-name="表格2.A2" office:value-type="string">
            <text:p text:style-name="P15">彈性低：需求一旦變更，代價極高 使用者很晚才看到成品 若需求一開始就錯了，整個重來</text:p>
          </table:table-cell>
        </table:table-row>
      </table:table>
      <text:p text:style-name="P10"/>
      <text:p text:style-name="Standard"/>
      <text:p text:style-name="P9"><text:s text:c="2"/>第三章：雛型模型（Prototype）</text:p>
      <text:p text:style-name="P10"/>
      <text:p text:style-name="P21">3.1 核心概念</text:p>
      <text:p text:style-name="P11">雛型模型的核心思想是：「需求不確定時，先做一個快速的原型（Prototype）給使用者看，根據回饋再修正」。</text:p>
      <text:p text:style-name="P12"/>
      <text:p text:style-name="P22">快速建立原型 <text:s/>→ <text:s/>使用者評估回饋 <text:s/>→ <text:s/>修正原型 <text:s/>→ <text:s/>確認需求 <text:s/>→ <text:s/>正式開發</text:p>
      <text:p text:style-name="P22">（Build Prototype） <text:s/>（User Evaluation） <text:s/>（Refine） <text:s/>（Confirm） <text:s/>（Develop）</text:p>
      <text:p text:style-name="P24"/>
      <text:p text:style-name="P23"><text:s text:c="15"/>↑______________↓ <text:s/>（可能重複多次）</text:p>
      <text:p text:style-name="P10"/>
      <text:p text:style-name="P21">3.2 兩種類型（考試常考）</text:p>
      <text:p text:style-name="P12"/>
      <table:table table:name="表格3" table:style-name="表格3">
        <table:table-column table:style-name="表格3.A"/>
        <table:table-column table:style-name="表格3.B" table:number-columns-repeated="2"/>
        <table:table-row table:style-name="表格3.1">
          <table:table-cell table:style-name="表格3.A1" office:value-type="string">
            <text:p text:style-name="P13">類型</text:p>
          </table:table-cell>
          <table:table-cell table:style-name="表格3.A1" office:value-type="string">
            <text:p text:style-name="P13">說明</text:p>
          </table:table-cell>
          <table:table-cell table:style-name="表格3.A1" office:value-type="string">
            <text:p text:style-name="P13">最後原型的去處</text:p>
          </table:table-cell>
        </table:table-row>
        <table:table-row table:style-name="表格3.1">
          <table:table-cell table:style-name="表格3.A2" office:value-type="string">
            <text:p text:style-name="P14">拋棄式雛型 (Throwaway)</text:p>
          </table:table-cell>
          <table:table-cell table:style-name="表格3.B2" office:value-type="string">
            <text:p text:style-name="P15">原型只用來「確認需求」，確認後丟掉，再重新正式開發</text:p>
          </table:table-cell>
          <table:table-cell table:style-name="表格3.C2" office:value-type="string">
            <text:p text:style-name="P15">丟棄，重新開發正式系統</text:p>
          </table:table-cell>
        </table:table-row>
        <table:table-row table:style-name="表格3.1">
          <table:table-cell table:style-name="表格3.A3" office:value-type="string">
            <text:p text:style-name="P14">演化式雛型 (Evolutionary)</text:p>
          </table:table-cell>
          <table:table-cell table:style-name="表格3.B2" office:value-type="string">
            <text:p text:style-name="P15">原型不斷修改改進，最終演化成正式系統</text:p>
          </table:table-cell>
          <table:table-cell table:style-name="表格3.A3" office:value-type="string">
            <text:p text:style-name="P15">保留，持續演化成最終系統</text:p>
          </table:table-cell>
        </table:table-row>
      </table:table>
      <text:p text:style-name="P17"/>
      <text:p text:style-name="P21">3.3 優缺點</text:p>
      <text:p text:style-name="P12"/>
      <table:table table:name="表格4" table:style-name="表格4">
        <table:table-column table:style-name="表格4.A" table:number-columns-repeated="2"/>
        <table:table-row table:style-name="表格4.1">
          <table:table-cell table:style-name="表格4.A1" office:value-type="string">
            <text:p text:style-name="P13">✅ <text:s/>優點</text:p>
          </table:table-cell>
          <table:table-cell table:style-name="表格4.B1" office:value-type="string">
            <text:p text:style-name="P13">❌ <text:s/>缺點</text:p>
          </table:table-cell>
        </table:table-row>
        <table:table-row table:style-name="表格4.1">
          <table:table-cell table:style-name="表格4.A2" office:value-type="string">
            <text:p text:style-name="P15">需求確認快，減少做錯的風險 使用者早期介入，滿意度高</text:p>
          </table:table-cell>
          <table:table-cell table:style-name="表格4.A2" office:value-type="string">
            <text:p text:style-name="P15">可能過度聚焦 UI 外觀，忽略內部架構設計 客戶可能誤以為原型就是最終產品（管理期望困難）</text:p>
          </table:table-cell>
        </table:table-row>
      </table:table>
      <text:p text:style-name="P10"/>
      <text:p text:style-name="Standard"/>
      <text:p text:style-name="P9"><text:s text:c="2"/>第四章：漸增模型（Incremental）</text:p>
      <text:p text:style-name="P10"/>
      <text:p text:style-name="P21">4.1 核心概念</text:p>
      <text:p text:style-name="P11">漸增模型的核心：把系統切成多個「功能增量（Increment）」，分段開發，每一段完成後都產出一個「可運作的子系統」，最終逐步組成完整系統。</text:p>
      <text:p text:style-name="P17"/>
      <text:p text:style-name="P25">◆ 用「外送 App」舉例</text:p>
      <text:p text:style-name="P22">版本 1： <text:s/>只能「瀏覽餐廳」 <text:s text:c="7"/>→ 可以上線，使用者能用 ✔</text:p>
      <text:p text:style-name="P22">版本 2： <text:s/>加上「加入購物車」功能 <text:s text:c="2"/>→ 更完整，使用者更能用 ✔</text:p>
      <text:p text:style-name="P22">版本 3： <text:s/>加上「線上付款」功能 <text:s text:c="4"/>→ 系統完整 ✔</text:p>
      <text:p text:style-name="P24"/>
      <text:p text:style-name="P23">每一版都能獨立運作，不需要等全部功能做完才交付</text:p>
      <text:p text:style-name="P10"/>
      <text:p text:style-name="P21">4.2 漸增 vs 敏捷：差在哪裡？（考試最常混淆）</text:p>
      <text:p text:style-name="P12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13">比較項目</text:p>
          </table:table-cell>
          <table:table-cell table:style-name="表格5.B1" office:value-type="string">
            <text:p text:style-name="P13">漸增（Incremental）</text:p>
          </table:table-cell>
          <table:table-cell table:style-name="表格5.C1" office:value-type="string">
            <text:p text:style-name="P13">敏捷（Agile/Scrum）</text:p>
          </table:table-cell>
        </table:table-row>
        <table:table-row table:style-name="表格5.1">
          <table:table-cell table:style-name="表格5.A2" office:value-type="string">
            <text:p text:style-name="P14">分段交付功能</text:p>
          </table:table-cell>
          <table:table-cell table:style-name="表格5.B2" office:value-type="string">
            <text:p text:style-name="P15">✅ 有（核心特色）</text:p>
          </table:table-cell>
          <table:table-cell table:style-name="表格5.B2" office:value-type="string">
            <text:p text:style-name="P15">✅ 有</text:p>
          </table:table-cell>
        </table:table-row>
        <table:table-row table:style-name="表格5.1">
          <table:table-cell table:style-name="表格5.A2" office:value-type="string">
            <text:p text:style-name="P14">每段完成後根據回饋修正方向</text:p>
          </table:table-cell>
          <table:table-cell table:style-name="表格5.B3" office:value-type="string">
            <text:p text:style-name="P15">❌ 不一定（可能沒有正式回饋機制）</text:p>
          </table:table-cell>
          <table:table-cell table:style-name="表格5.B2" office:value-type="string">
            <text:p text:style-name="P15">✅ 有（Sprint Review、回饋循環是核心）</text:p>
          </table:table-cell>
        </table:table-row>
        <table:table-row table:style-name="表格5.1">
          <table:table-cell table:style-name="表格5.A2" office:value-type="string">
            <text:p text:style-name="P14">有固定流程與角色分工</text:p>
          </table:table-cell>
          <table:table-cell table:style-name="表格5.B3" office:value-type="string">
            <text:p text:style-name="P15">❌ 沒有規定</text:p>
          </table:table-cell>
          <table:table-cell table:style-name="表格5.B2" office:value-type="string">
            <text:p text:style-name="P15">✅ 有（Scrum Master、PO 等）</text:p>
          </table:table-cell>
        </table:table-row>
        <table:table-row table:style-name="表格5.1">
          <table:table-cell table:style-name="表格5.A2" office:value-type="string">
            <text:p text:style-name="P14">屬於敏捷方法</text:p>
          </table:table-cell>
          <table:table-cell table:style-name="表格5.B3" office:value-type="string">
            <text:p text:style-name="P15">❌ 不一定（可以配合瀑布使用）</text:p>
          </table:table-cell>
          <table:table-cell table:style-name="表格5.B2" office:value-type="string">
            <text:p text:style-name="P15">✅ 是敏捷的具體實踐方法</text:p>
          </table:table-cell>
        </table:table-row>
        <table:table-row table:style-name="表格5.1">
          <table:table-cell table:style-name="表格5.A2" office:value-type="string">
            <text:p text:style-name="P14">層級定位</text:p>
          </table:table-cell>
          <table:table-cell table:style-name="表格5.B6" office:value-type="string">
            <text:p text:style-name="P15">開發「策略」（怎麼切割系統）</text:p>
          </table:table-cell>
          <table:table-cell table:style-name="表格5.B6" office:value-type="string">
            <text:p text:style-name="P15">開發「方法論」（整個團隊怎麼運作）</text:p>
          </table:table-cell>
        </table:table-row>
      </table:table>
      <text:p text:style-name="P17"/>
      <text:p text:style-name="P18"><text:s text:c="2"/>⚠ <text:s/>觀念補正 / 注意事項</text:p>
      <text:p text:style-name="P19">⚠ <text:s/>重要觀念補正：</text:p>
      <text:p text:style-name="P19"><text:s text:c="3"/>漸增模型強調「功能一段一段加上去」，但本身並不規定每段結束後要「根據回饋調整方向」。</text:p>
      <text:p text:style-name="P19"><text:s text:c="3"/>敏捷則兩者都有：分段交付（Incremental）+ 每段反覆修正（Iterative）。</text:p>
      <text:p text:style-name="P19"><text:s text:c="3"/>→ Scrum = Incremental（分段加功能）+ Iterative（每段結束後修正）</text:p>
      <text:p text:style-name="P26"/>
      <text:p text:style-name="P19"><text:s text:c="3"/>漸增可以配合「瀑布式計畫」使用：先規劃好所有分段，再一段一段執行，中間不調整方向。</text:p>
      <text:p text:style-name="P20"><text:s text:c="3"/>這就是為什麼漸增模型「不一定屬於敏捷」。</text:p>
      <text:p text:style-name="P10"/>
      <text:p text:style-name="Standard"/>
      <text:p text:style-name="P9"><text:s text:c="2"/>第五章：敏捷開發（Agile）</text:p>
      <text:p text:style-name="P10"/>
      <text:p text:style-name="P21">5.1 敏捷是一種「思維方式」，不是一個工具</text:p>
      <text:p text:style-name="P27"><text:span text:style-name="T1">Agile 是由 2001 年《</text:span><text:span text:style-name="T2">敏捷宣言（Agile Manifesto）</text:span><text:span text:style-name="T1">》確立的開發哲學，強調四個核心價值觀：</text:span></text:p>
      <text:p text:style-name="P12"/>
      <table:table table:name="表格6" table:style-name="表格6">
        <table:table-column table:style-name="表格6.A" table:number-columns-repeated="2"/>
        <table:table-row table:style-name="表格6.1">
          <table:table-cell table:style-name="表格6.A1" office:value-type="string">
            <text:p text:style-name="P13">敏捷宣言更重視</text:p>
          </table:table-cell>
          <table:table-cell table:style-name="表格6.B1" office:value-type="string">
            <text:p text:style-name="P13">而非（非指完全不要）</text:p>
          </table:table-cell>
        </table:table-row>
        <table:table-row table:style-name="表格6.1">
          <table:table-cell table:style-name="表格6.A2" office:value-type="string">
            <text:p text:style-name="P14">個人與互動</text:p>
          </table:table-cell>
          <table:table-cell table:style-name="表格6.B2" office:value-type="string">
            <text:p text:style-name="P15">流程與工具</text:p>
          </table:table-cell>
        </table:table-row>
        <table:table-row table:style-name="表格6.1">
          <table:table-cell table:style-name="表格6.A2" office:value-type="string">
            <text:p text:style-name="P14">可運作的軟體</text:p>
          </table:table-cell>
          <table:table-cell table:style-name="表格6.B2" office:value-type="string">
            <text:p text:style-name="P15">詳盡的文件</text:p>
          </table:table-cell>
        </table:table-row>
        <table:table-row table:style-name="表格6.1">
          <table:table-cell table:style-name="表格6.A2" office:value-type="string">
            <text:p text:style-name="P14">與客戶合作</text:p>
          </table:table-cell>
          <table:table-cell table:style-name="表格6.B2" office:value-type="string">
            <text:p text:style-name="P15">合約談判</text:p>
          </table:table-cell>
        </table:table-row>
        <table:table-row table:style-name="表格6.1">
          <table:table-cell table:style-name="表格6.A2" office:value-type="string">
            <text:p text:style-name="P14">回應變化</text:p>
          </table:table-cell>
          <table:table-cell table:style-name="表格6.B2" office:value-type="string">
            <text:p text:style-name="P15">遵循計畫</text:p>
          </table:table-cell>
        </table:table-row>
      </table:table>
      <text:p text:style-name="P17"/>
      <text:p text:style-name="P21">5.2 敏捷的三個關鍵特徵</text:p>
      <text:p text:style-name="P27"><text:span text:style-name="T2">短週期迭代（Iteration）：</text:span><text:span text:style-name="T1"> 每 1~4 週完成一個可交付版本，而不是做幾個月才交付。</text:span></text:p>
      <text:p text:style-name="P27"><text:span text:style-name="T2">持續交付（Continuous Delivery）：</text:span><text:span text:style-name="T1"> 每個迭代結束後都有可用的產品增量可以交付。</text:span></text:p>
      <text:p text:style-name="P27"><text:span text:style-name="T2">回饋驅動修正（Feedback-driven）：</text:span><text:span text:style-name="T1"> 每次交付後收集使用者回饋，下個迭代調整方向。這是與純漸增模型最大的不同。</text:span></text:p>
      <text:p text:style-name="P12"/>
      <text:p text:style-name="P6"><text:s text:c="2"/>📌 <text:s/>重點整理</text:p>
      <text:p text:style-name="P7"><text:s text:c="2"/>敏捷 = Iterative（反覆修正）+ Incremental（逐步增加功能）</text:p>
      <text:p text:style-name="P8"><text:s text:c="2"/>純漸增模型只有「逐步增加功能」，但不一定有系統性的「反覆修正」機制。</text:p>
      <text:p text:style-name="P10"/>
      <text:p text:style-name="P21">5.3 四大敏捷方法比較</text:p>
      <text:p text:style-name="P12"/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row table:style-name="表格7.1">
          <table:table-cell table:style-name="表格7.A1" office:value-type="string">
            <text:p text:style-name="P13">方法</text:p>
          </table:table-cell>
          <table:table-cell table:style-name="表格7.A1" office:value-type="string">
            <text:p text:style-name="P13">核心做法</text:p>
          </table:table-cell>
          <table:table-cell table:style-name="表格7.A1" office:value-type="string">
            <text:p text:style-name="P13">最適合</text:p>
          </table:table-cell>
          <table:table-cell table:style-name="表格7.A1" office:value-type="string">
            <text:p text:style-name="P13">一句話記憶</text:p>
          </table:table-cell>
        </table:table-row>
        <table:table-row table:style-name="表格7.1">
          <table:table-cell table:style-name="表格7.A2" office:value-type="string">
            <text:p text:style-name="P14">Scrum</text:p>
          </table:table-cell>
          <table:table-cell table:style-name="表格7.B2" office:value-type="string">
            <text:p text:style-name="P15"><text:span text:style-name="T3">Sprint（短衝）</text:span> + <text:span text:style-name="T4">固定角色</text:span> + <text:span text:style-name="T5">每日站立會議</text:span></text:p>
          </table:table-cell>
          <table:table-cell table:style-name="表格7.B2" office:value-type="string">
            <text:p text:style-name="P15">需要明確流程管理的產品開發</text:p>
          </table:table-cell>
          <table:table-cell table:style-name="表格7.D2" office:value-type="string">
            <text:p text:style-name="P28">打遊戲副本，兩週打一關</text:p>
          </table:table-cell>
        </table:table-row>
        <table:table-row table:style-name="表格7.1">
          <table:table-cell table:style-name="表格7.A3" office:value-type="string">
            <text:p text:style-name="P14">Kanban</text:p>
          </table:table-cell>
          <table:table-cell table:style-name="表格7.B2" office:value-type="string">
            <text:p text:style-name="P15"><text:span text:style-name="T3">可視化看板</text:span>（To Do/Doing/Done）+ WIP 限制</text:p>
          </table:table-cell>
          <table:table-cell table:style-name="表格7.B2" office:value-type="string">
            <text:p text:style-name="P15">維運、支援型工作流程管理</text:p>
          </table:table-cell>
          <table:table-cell table:style-name="表格7.A3" office:value-type="string">
            <text:p text:style-name="P16">便利貼任務牆，控管進行中數量</text:p>
          </table:table-cell>
        </table:table-row>
        <table:table-row table:style-name="表格7.1">
          <table:table-cell table:style-name="表格7.A4" office:value-type="string">
            <text:p text:style-name="P14">XP</text:p>
          </table:table-cell>
          <table:table-cell table:style-name="表格7.B2" office:value-type="string">
            <text:p text:style-name="P15">TDD + 結對程式設計 + 持續整合 + 簡單設計</text:p>
          </table:table-cell>
          <table:table-cell table:style-name="表格7.B2" office:value-type="string">
            <text:p text:style-name="P15">技術品質要求極高的工程團隊</text:p>
          </table:table-cell>
          <table:table-cell table:style-name="表格7.A4" office:value-type="string">
            <text:p text:style-name="P16">寫程式要非常嚴謹</text:p>
          </table:table-cell>
        </table:table-row>
        <table:table-row table:style-name="表格7.1">
          <table:table-cell table:style-name="表格7.A5" office:value-type="string">
            <text:p text:style-name="P14">Lean</text:p>
          </table:table-cell>
          <table:table-cell table:style-name="表格7.B2" office:value-type="string">
            <text:p text:style-name="P15">消除浪費（7 種浪費）+ MVP + 快速驗證假設</text:p>
          </table:table-cell>
          <table:table-cell table:style-name="表格7.B2" office:value-type="string">
            <text:p text:style-name="P15">新創產品、需要快速市場驗證</text:p>
          </table:table-cell>
          <table:table-cell table:style-name="表格7.A5" office:value-type="string">
            <text:p text:style-name="P16">先做最小可用版本，再決定要不要繼續</text:p>
          </table:table-cell>
        </table:table-row>
      </table:table>
      <text:p text:style-name="P10"/>
      <text:p text:style-name="Standard"/>
      <text:p text:style-name="P9"><text:s text:c="2"/>第六章：Scrum 詳解</text:p>
      <text:p text:style-name="P10"/>
      <text:p text:style-name="P21">6.1 三個角色</text:p>
      <text:p text:style-name="P12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3">角色</text:p>
          </table:table-cell>
          <table:table-cell table:style-name="表格8.A1" office:value-type="string">
            <text:p text:style-name="P13">職責</text:p>
          </table:table-cell>
          <table:table-cell table:style-name="表格8.A1" office:value-type="string">
            <text:p text:style-name="P13">白話說明</text:p>
          </table:table-cell>
        </table:table-row>
        <table:table-row table:style-name="表格8.1">
          <table:table-cell table:style-name="表格8.A2" office:value-type="string">
            <text:p text:style-name="P14">Product Owner （產品負責人）</text:p>
          </table:table-cell>
          <table:table-cell table:style-name="表格8.B2" office:value-type="string">
            <text:p text:style-name="P15">決定「要做什麼」，維護 Product Backlog</text:p>
          </table:table-cell>
          <table:table-cell table:style-name="表格8.C2" office:value-type="string">
            <text:p text:style-name="P15">代表客戶，決定需求的優先順序</text:p>
          </table:table-cell>
        </table:table-row>
        <table:table-row table:style-name="表格8.1">
          <table:table-cell table:style-name="表格8.A3" office:value-type="string">
            <text:p text:style-name="P14">Scrum Master</text:p>
          </table:table-cell>
          <table:table-cell table:style-name="表格8.B2" office:value-type="string">
            <text:p text:style-name="P15">確保 Scrum 流程順暢，移除阻礙</text:p>
          </table:table-cell>
          <table:table-cell table:style-name="表格8.A3" office:value-type="string">
            <text:p text:style-name="P15">像教練，不發號施令，幫團隊排除障礙</text:p>
          </table:table-cell>
        </table:table-row>
        <table:table-row table:style-name="表格8.1">
          <table:table-cell table:style-name="表格8.A4" office:value-type="string">
            <text:p text:style-name="P14">開發團隊 （Development Team）</text:p>
          </table:table-cell>
          <table:table-cell table:style-name="表格8.B2" office:value-type="string">
            <text:p text:style-name="P15">自組織，負責實際開發工作</text:p>
          </table:table-cell>
          <table:table-cell table:style-name="表格8.A4" office:value-type="string">
            <text:p text:style-name="P15">自己決定怎麼做，通常 3~9 人</text:p>
          </table:table-cell>
        </table:table-row>
      </table:table>
      <text:p text:style-name="P10"/>
      <text:p text:style-name="P21">6.2 Scrum 流程（Sprint）</text:p>
      <text:p text:style-name="P11"><text:span text:style-name="T6">Sprint </text:span>是 <text:span text:style-name="T4">Scrum 的核心單位</text:span>，<text:span text:style-name="T7">通常 1~4 週（最常見 2 週）</text:span>。每個 Sprint 的完整流程：</text:p>
      <text:p text:style-name="P12"/>
      <text:p text:style-name="P22"><text:span text:style-name="T8">Product Backlog（完整需求清單</text:span>，由 PO 維護）</text:p>
      <text:p text:style-name="P22"><text:s text:c="9"/>↓</text:p>
      <text:p text:style-name="P22">Sprint Planning（Sprint 計畫會議：<text:span text:style-name="T8">從 Backlog 選出這次要做的項目</text:span>）</text:p>
      <text:p text:style-name="P22"><text:s text:c="9"/>↓</text:p>
      <text:p text:style-name="P22">Sprint Backlog（<text:span text:style-name="T9">這次 Sprint</text:span><text:span text:style-name="T10"> 的工作清單</text:span>）</text:p>
      <text:p text:style-name="P22"><text:s text:c="9"/>↓</text:p>
      <text:p text:style-name="P22">Sprint 執行（1~4 週）← <text:span text:style-name="T11">每天有 Daily Scrum（15 分鐘站立會議）</text:span></text:p>
      <text:p text:style-name="P22"><text:s text:c="9"/>↓</text:p>
      <text:p text:style-name="P22">Sprint Review（<text:span text:style-name="T12">Demo 給利害關係人看，收集回饋</text:span>）</text:p>
      <text:p text:style-name="P22"><text:s text:c="9"/>↓</text:p>
      <text:p text:style-name="P22">Sprint Retrospective（<text:span text:style-name="T12">回顧會議：討論流程如何改進</text:span>）</text:p>
      <text:p text:style-name="P22"><text:s text:c="9"/>↓</text:p>
      <text:p text:style-name="P23"><text:span text:style-name="T11">Increment（可交付的產品增量）</text:span>→ <text:span text:style-name="T3">進入下一個 Sprint</text:span></text:p>
      <text:p text:style-name="P10"/>
      <text:p text:style-name="P21">6.3 關鍵名詞</text:p>
      <text:p text:style-name="P12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3">名詞</text:p>
          </table:table-cell>
          <table:table-cell table:style-name="表格9.A1" office:value-type="string">
            <text:p text:style-name="P13">說明</text:p>
          </table:table-cell>
        </table:table-row>
        <table:table-row table:style-name="表格9.1">
          <table:table-cell table:style-name="表格9.A2" office:value-type="string">
            <text:p text:style-name="P14">Product Backlog</text:p>
          </table:table-cell>
          <table:table-cell table:style-name="表格9.B2" office:value-type="string">
            <text:p text:style-name="P15"><text:span text:style-name="T5">完整的需求清單</text:span>，依優先順序排列，由 Product Owner 負責維護</text:p>
          </table:table-cell>
        </table:table-row>
        <table:table-row table:style-name="表格9.1">
          <table:table-cell table:style-name="表格9.A2" office:value-type="string">
            <text:p text:style-name="P14">Sprint Backlog</text:p>
          </table:table-cell>
          <table:table-cell table:style-name="表格9.B2" office:value-type="string">
            <text:p text:style-name="P15">從 Product Backlog 中選出「<text:span text:style-name="T4">這次 Sprint 要完成的項目</text:span>」的工作清單</text:p>
          </table:table-cell>
        </table:table-row>
        <table:table-row table:style-name="表格9.1">
          <table:table-cell table:style-name="表格9.A2" office:value-type="string">
            <text:p text:style-name="P14">Increment</text:p>
          </table:table-cell>
          <table:table-cell table:style-name="表格9.B2" office:value-type="string">
            <text:p text:style-name="P29">每個 Sprint 結束後產出的「可交付的產品版本」（就是一個 Increment）</text:p>
          </table:table-cell>
        </table:table-row>
        <table:table-row table:style-name="表格9.1">
          <table:table-cell table:style-name="表格9.A2" office:value-type="string">
            <text:p text:style-name="P14">Sprint</text:p>
          </table:table-cell>
          <table:table-cell table:style-name="表格9.B2" office:value-type="string">
            <text:p text:style-name="P30">一個固定時間盒（Time-box），通常 1~4 週，Scrum 的基本工作週期</text:p>
          </table:table-cell>
        </table:table-row>
        <table:table-row table:style-name="表格9.1">
          <table:table-cell table:style-name="表格9.A2" office:value-type="string">
            <text:p text:style-name="P14">Velocity</text:p>
          </table:table-cell>
          <table:table-cell table:style-name="表格9.B2" office:value-type="string">
            <text:p text:style-name="P15">團隊每個 Sprint 平均能完成的工作量，用於預測進度</text:p>
          </table:table-cell>
        </table:table-row>
        <table:table-row table:style-name="表格9.1">
          <table:table-cell table:style-name="表格9.A2" office:value-type="string">
            <text:p text:style-name="P14">Definition of Done</text:p>
          </table:table-cell>
          <table:table-cell table:style-name="表格9.B2" office:value-type="string">
            <text:p text:style-name="P15">團隊共同定義「什麼叫做完成」的標準，確保品質一致性</text:p>
          </table:table-cell>
        </table:table-row>
      </table:table>
      <text:p text:style-name="P10"/>
      <text:p text:style-name="Standard"/>
      <text:p text:style-name="P9"><text:s text:c="2"/>第七章：Kanban、XP、Lean 詳解</text:p>
      <text:p text:style-name="P10"/>
      <text:p text:style-name="P21">7.1 Kanban（看板法）</text:p>
      <text:p text:style-name="P11"><text:span text:style-name="T13">Kanban 源自豐田汽車的生產管理系統</text:span>，核心是「讓工作流程可視化，並控制在製品數量」。</text:p>
      <text:p text:style-name="P12"/>
      <text:p text:style-name="P25">◆ 看板的基本欄位</text:p>
      <text:p text:style-name="P22">┌──────────────┬──────────────┬──────────────┐</text:p>
      <text:p text:style-name="P31">│ <text:s text:c="3"/><text:span text:style-name="T14">To Do <text:s text:c="4"/>│ <text:s text:c="3"/>Doing <text:s text:c="4"/>│ <text:s text:c="4"/>Done <text:s text:c="4"/>│</text:span></text:p>
      <text:p text:style-name="P31"><text:span text:style-name="T14">│ <text:s text:c="2"/>(待辦) <text:s text:c="5"/>│ <text:s/>(進行中) <text:s text:c="4"/>│ <text:s text:c="2"/>(完成) <text:s/></text:span><text:s text:c="4"/>│</text:p>
      <text:p text:style-name="P22">│ <text:s text:c="13"/>│ <text:s/>WIP 限制: 3 │ <text:s text:c="13"/>│</text:p>
      <text:p text:style-name="P22">│ <text:s/>[任務 A] <text:s text:c="3"/>│ <text:s/>[任務 B] <text:s text:c="3"/>│ <text:s/>[任務 E] <text:s text:c="3"/>│</text:p>
      <text:p text:style-name="P22">│ <text:s/>[任務 C] <text:s text:c="3"/>│ <text:s/>[任務 D] <text:s text:c="3"/>│ <text:s/>[任務 F] <text:s text:c="3"/>│</text:p>
      <text:p text:style-name="P22">│ <text:s/>[任務 G] <text:s text:c="3"/>│ <text:s/>[任務 H] <text:s text:c="3"/>│ <text:s text:c="13"/>│</text:p>
      <text:p text:style-name="P22">└──────────────┴──────────────┴──────────────┘</text:p>
      <text:p text:style-name="P22"><text:s text:c="20"/>↑</text:p>
      <text:p text:style-name="P23"><text:s text:c="9"/><text:span text:style-name="T15">WIP 限制控制這欄最多幾張卡</text:span></text:p>
      <text:p text:style-name="P17"/>
      <text:p text:style-name="P25">◆<text:span text:style-name="T16"> WIP（Work In Progress）限制</text:span> — 為什麼要限制？</text:p>
      <text:p text:style-name="P27"><text:span text:style-name="T17">WIP 限制</text:span><text:span text:style-name="T18">是 Kanban 最重要的機制</text:span><text:span text:style-name="T1">：</text:span><text:span text:style-name="T19">規定</text:span><text:span text:style-name="T20">「進行中」欄位</text:span><text:span text:style-name="T19">最多能有幾個任務</text:span><text:span text:style-name="T1">。</text:span></text:p>
      <text:p text:style-name="P12"/>
      <text:p text:style-name="P18"><text:s text:c="2"/>⚠ <text:s/>觀念補正 / 注意事項</text:p>
      <text:p text:style-name="P19">⚠ <text:s/><text:span text:style-name="T21">WIP 限制的原因（原始對話解釋不夠清楚）：</text:span></text:p>
      <text:p text:style-name="P19"><text:span text:style-name="T21"><text:s text:c="3"/>同時做太多事情（多工）</text:span>會導致：</text:p>
      <text:p text:style-name="P19"><text:s text:c="3"/>1. <text:span text:style-name="T8">頻繁切換造成時間浪費（Context Switching）</text:span></text:p>
      <text:p text:style-name="P19"><text:s text:c="3"/>2. <text:span text:style-name="T8">每件事都做一半，卻沒有任何一件真正完成</text:span></text:p>
      <text:p text:style-name="P19"><text:s text:c="3"/>3. <text:span text:style-name="T8">瓶頸不容易被發現（大家都「忙」，但沒有東西「完成」）</text:span></text:p>
      <text:p text:style-name="P26"/>
      <text:p text:style-name="P19"><text:s text:c="3"/><text:span text:style-name="T22">設定 WIP 限制後：當「進行中」已滿，就不能再拉新任務進來，</text:span></text:p>
      <text:p text:style-name="P20"><text:s text:c="3"/><text:span text:style-name="T5">迫使成員先把現有任務完成</text:span>，讓工作流動更順暢，瓶頸也更容易被看見。</text:p>
      <text:p text:style-name="P12"/>
      <table:table table:name="表格10" table:style-name="表格10">
        <table:table-column table:style-name="表格10.A" table:number-columns-repeated="2"/>
        <table:table-row table:style-name="表格10.1">
          <table:table-cell table:style-name="表格10.A1" office:value-type="string">
            <text:p text:style-name="P13">✅ <text:s/>優點</text:p>
          </table:table-cell>
          <table:table-cell table:style-name="表格10.B1" office:value-type="string">
            <text:p text:style-name="P13">❌ <text:s/>缺點</text:p>
          </table:table-cell>
        </table:table-row>
        <table:table-row table:style-name="表格10.1">
          <table:table-cell table:style-name="表格10.A2" office:value-type="string">
            <text:p text:style-name="P15">工作流程可視化，瓶頸一眼看出 彈性高，不需要 Sprint 固定週期 適合維運、客服等持續流入的工作</text:p>
          </table:table-cell>
          <table:table-cell table:style-name="表格10.A2" office:value-type="string">
            <text:p text:style-name="P15">缺乏明確的迭代節奏（沒有 Sprint） 不適合需要固定計畫的大型專案</text:p>
          </table:table-cell>
        </table:table-row>
      </table:table>
      <text:p text:style-name="P10"/>
      <text:p text:style-name="P21">7.2 XP（Extreme Programming，<text:span text:style-name="T16">極致程式設計</text:span>）</text:p>
      <text:p text:style-name="P11"><text:span text:style-name="T11">XP 是敏捷方法中最注重「工程技術實踐」的方法</text:span>，<text:span text:style-name="T23">強調高品質程式碼和持續改進</text:span>。</text:p>
      <text:p text:style-name="P12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3">XP 核心實踐</text:p>
          </table:table-cell>
          <table:table-cell table:style-name="表格11.A1" office:value-type="string">
            <text:p text:style-name="P13">說明</text:p>
          </table:table-cell>
        </table:table-row>
        <table:table-row table:style-name="表格11.1">
          <table:table-cell table:style-name="表格11.A2" office:value-type="string">
            <text:p text:style-name="P32">TDD（測試驅動開發）</text:p>
          </table:table-cell>
          <table:table-cell table:style-name="表格11.B2" office:value-type="string">
            <text:p text:style-name="P15"><text:span text:style-name="T3">先寫測試案例，再寫程式碼，確保程式碼符合需求才算完成</text:span>。流程：寫測試 → 測試失敗 → 寫程式碼 → 測試通過 → 重構</text:p>
          </table:table-cell>
        </table:table-row>
        <table:table-row table:style-name="表格11.1">
          <table:table-cell table:style-name="表格11.A2" office:value-type="string">
            <text:p text:style-name="P32">結對程式設計 （Pair Programming）</text:p>
          </table:table-cell>
          <table:table-cell table:style-name="表格11.B2" office:value-type="string">
            <text:p text:style-name="P15"><text:span text:style-name="T24">兩個人共用一台電腦：一人寫程式（Driver），一人即時審查（Navigator），輪流互換</text:span>。即時發現錯誤，知識傳承效果佳</text:p>
          </table:table-cell>
        </table:table-row>
        <table:table-row table:style-name="表格11.1">
          <table:table-cell table:style-name="表格11.A2" office:value-type="string">
            <text:p text:style-name="P32">持續整合（CI）</text:p>
          </table:table-cell>
          <table:table-cell table:style-name="表格11.B2" office:value-type="string">
            <text:p text:style-name="P33">每寫完一小段程式，就整合到主分支並自動執行測試，確保隨時都能運作</text:p>
          </table:table-cell>
        </table:table-row>
        <text:soft-page-break/>
        <table:table-row table:style-name="表格11.1">
          <table:table-cell table:style-name="表格11.A2" office:value-type="string">
            <text:p text:style-name="P32">重構（Refactoring）</text:p>
          </table:table-cell>
          <table:table-cell table:style-name="表格11.B2" office:value-type="string">
            <text:p text:style-name="P15">在不改變程式功能的前提下，<text:span text:style-name="T3">改善程式碼結構，使其更清晰、易維護</text:span></text:p>
          </table:table-cell>
        </table:table-row>
        <table:table-row table:style-name="表格11.1">
          <table:table-cell table:style-name="表格11.A2" office:value-type="string">
            <text:p text:style-name="P32">簡單設計 （Simple Design）</text:p>
          </table:table-cell>
          <table:table-cell table:style-name="表格11.B2" office:value-type="string">
            <text:p text:style-name="P15"><text:span text:style-name="T10">只做現在需要的功能，不做「猜測未來可能會用到」的設計</text:span>，避免過度工程化</text:p>
          </table:table-cell>
        </table:table-row>
      </table:table>
      <text:p text:style-name="P10"/>
      <text:p text:style-name="P21">7.3 Lean（精實開發）</text:p>
      <text:p text:style-name="P27"><text:span text:style-name="T2">Lean 源自豐田生產系統（Toyota Production System, TPS）</text:span><text:span text:style-name="T1">，核心是：</text:span><text:span text:style-name="T20">消除一切不增加價值的浪費</text:span><text:span text:style-name="T1">。</text:span></text:p>
      <text:p text:style-name="P12"/>
      <text:p text:style-name="P25">◆ Lean 的七種浪費（考試加分項）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3">No.</text:p>
          </table:table-cell>
          <table:table-cell table:style-name="表格12.A1" office:value-type="string">
            <text:p text:style-name="P13">浪費類型</text:p>
          </table:table-cell>
          <table:table-cell table:style-name="表格12.A1" office:value-type="string">
            <text:p text:style-name="P13">在軟體開發中的例子</text:p>
          </table:table-cell>
        </table:table-row>
        <table:table-row table:style-name="表格12.1">
          <table:table-cell table:style-name="表格12.A2" office:value-type="string">
            <text:p text:style-name="P34">1</text:p>
          </table:table-cell>
          <table:table-cell table:style-name="表格12.A2" office:value-type="string">
            <text:p text:style-name="P35">部分完成的工作</text:p>
          </table:table-cell>
          <table:table-cell table:style-name="表格12.C2" office:value-type="string">
            <text:p text:style-name="P36">寫好但沒測試的程式碼，或分析好但沒實作的需求</text:p>
          </table:table-cell>
        </table:table-row>
        <table:table-row table:style-name="表格12.1">
          <table:table-cell table:style-name="表格12.A2" office:value-type="string">
            <text:p text:style-name="P34">2</text:p>
          </table:table-cell>
          <table:table-cell table:style-name="表格12.A2" office:value-type="string">
            <text:p text:style-name="P35">多餘的功能</text:p>
          </table:table-cell>
          <table:table-cell table:style-name="表格12.C2" office:value-type="string">
            <text:p text:style-name="P15">做了「<text:span text:style-name="T13">以後可能用到</text:span>」但現在沒人要的功能</text:p>
          </table:table-cell>
        </table:table-row>
        <table:table-row table:style-name="表格12.1">
          <table:table-cell table:style-name="表格12.A2" office:value-type="string">
            <text:p text:style-name="P34">3</text:p>
          </table:table-cell>
          <table:table-cell table:style-name="表格12.A2" office:value-type="string">
            <text:p text:style-name="P35">重新學習</text:p>
          </table:table-cell>
          <table:table-cell table:style-name="表格12.C2" office:value-type="string">
            <text:p text:style-name="P15">因為文件不足或人員離職，<text:span text:style-name="T13">需要重新理解舊系統</text:span></text:p>
          </table:table-cell>
        </table:table-row>
        <table:table-row table:style-name="表格12.5">
          <table:table-cell table:style-name="表格12.A2" office:value-type="string">
            <text:p text:style-name="P34">4</text:p>
          </table:table-cell>
          <table:table-cell table:style-name="表格12.A2" office:value-type="string">
            <text:p text:style-name="P35">交接/切換</text:p>
          </table:table-cell>
          <table:table-cell table:style-name="表格12.C2" office:value-type="string">
            <text:p text:style-name="P15"><text:span text:style-name="T13">任務在不同人或系統之間等待的時間</text:span>（在製品等待）</text:p>
          </table:table-cell>
        </table:table-row>
        <table:table-row table:style-name="表格12.1">
          <table:table-cell table:style-name="表格12.A2" office:value-type="string">
            <text:p text:style-name="P34">5</text:p>
          </table:table-cell>
          <table:table-cell table:style-name="表格12.A2" office:value-type="string">
            <text:p text:style-name="P35">延誤</text:p>
          </table:table-cell>
          <table:table-cell table:style-name="表格12.C2" office:value-type="string">
            <text:p text:style-name="P15">等待審核、等待環境建置、等待決策</text:p>
          </table:table-cell>
        </table:table-row>
        <table:table-row table:style-name="表格12.1">
          <table:table-cell table:style-name="表格12.A2" office:value-type="string">
            <text:p text:style-name="P34">6</text:p>
          </table:table-cell>
          <table:table-cell table:style-name="表格12.A2" office:value-type="string">
            <text:p text:style-name="P35">任務切換</text:p>
          </table:table-cell>
          <table:table-cell table:style-name="表格12.C2" office:value-type="string">
            <text:p text:style-name="P15">同時處理太多事，頻繁切換導致效率下降</text:p>
          </table:table-cell>
        </table:table-row>
        <table:table-row table:style-name="表格12.1">
          <table:table-cell table:style-name="表格12.A2" office:value-type="string">
            <text:p text:style-name="P34">7</text:p>
          </table:table-cell>
          <table:table-cell table:style-name="表格12.A2" office:value-type="string">
            <text:p text:style-name="P35">缺陷</text:p>
          </table:table-cell>
          <table:table-cell table:style-name="表格12.C2" office:value-type="string">
            <text:p text:style-name="P15">程式錯誤造成的修正、重做</text:p>
          </table:table-cell>
        </table:table-row>
      </table:table>
      <text:p text:style-name="P17"/>
      <text:p text:style-name="P25">◆ MVP（最小可行產品）</text:p>
      <text:p text:style-name="P27"><text:span text:style-name="T25">MVP = Minimum Viable Product</text:span><text:span text:style-name="T1">，是 Lean 在產品開發中的核心工具。</text:span></text:p>
      <text:p text:style-name="P11">概念：<text:span text:style-name="T11">只做「最少功能」，讓你能快速投入市場，用真實使用者的回饋來決定要不要繼續、怎麼發展</text:span>，而<text:span text:style-name="T4">不是花幾個月把所有功能都做完才測試</text:span>。</text:p>
      <text:p text:style-name="P18"><text:s text:c="2"/>⚠ <text:s/>觀念補正 / 注意事項</text:p>
      <text:p text:style-name="P19">⚠ <text:s/>MVP 不是「做一個很爛的版本」！</text:p>
      <text:p text:style-name="P19"><text:s text:c="3"/><text:span text:style-name="T26">MVP 的重點是「可行（Viable）」——必須真的能讓使用者用，並且能驗證你的核心假設。</text:span></text:p>
      <text:p text:style-name="P20"><text:span text:style-name="T26"><text:s text:c="3"/>目標是用最少的投入，獲得最多的學習（learning）</text:span>。</text:p>
      <text:p text:style-name="P10"/>
      <text:p text:style-name="Standard"/>
      <text:p text:style-name="P9"><text:s text:c="2"/>第八章：全模型對照表（考試總複習）</text:p>
      <text:p text:style-name="P10"/>
      <text:p text:style-name="P21">8.1 四大模型完整比較</text:p>
      <text:p text:style-name="P12"/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/>
        <table:table-row table:style-name="表格13.1">
          <table:table-cell table:style-name="表格13.A1" office:value-type="string">
            <text:p text:style-name="P13">比較項目</text:p>
          </table:table-cell>
          <table:table-cell table:style-name="表格13.A1" office:value-type="string">
            <text:p text:style-name="P13">瀑布</text:p>
          </table:table-cell>
          <table:table-cell table:style-name="表格13.C1" office:value-type="string">
            <text:p text:style-name="P13">雛型</text:p>
          </table:table-cell>
          <table:table-cell table:style-name="表格13.D1" office:value-type="string">
            <text:p text:style-name="P13">漸增</text:p>
          </table:table-cell>
          <table:table-cell table:style-name="表格13.E1" office:value-type="string">
            <text:p text:style-name="P13">敏捷</text:p>
          </table:table-cell>
        </table:table-row>
        <table:table-row table:style-name="表格13.1">
          <table:table-cell table:style-name="表格13.A2" office:value-type="string">
            <text:p text:style-name="P14">交付方式</text:p>
          </table:table-cell>
          <table:table-cell table:style-name="表格13.A2" office:value-type="string">
            <text:p text:style-name="P15">最後一次交付</text:p>
          </table:table-cell>
          <table:table-cell table:style-name="表格13.C2" office:value-type="string">
            <text:p text:style-name="P15">確認需求後交付</text:p>
          </table:table-cell>
          <table:table-cell table:style-name="表格13.D2" office:value-type="string">
            <text:p text:style-name="P15">分段交付</text:p>
          </table:table-cell>
          <table:table-cell table:style-name="表格13.E2" office:value-type="string">
            <text:p text:style-name="P15">持續交付</text:p>
          </table:table-cell>
        </table:table-row>
        <table:table-row table:style-name="表格13.1">
          <table:table-cell table:style-name="表格13.A2" office:value-type="string">
            <text:p text:style-name="P14">需求彈性</text:p>
          </table:table-cell>
          <table:table-cell table:style-name="表格13.A2" office:value-type="string">
            <text:p text:style-name="P15">❌ 幾乎不能變</text:p>
          </table:table-cell>
          <table:table-cell table:style-name="表格13.C2" office:value-type="string">
            <text:p text:style-name="P15">⚠ 初期確認後固定</text:p>
          </table:table-cell>
          <table:table-cell table:style-name="表格13.D2" office:value-type="string">
            <text:p text:style-name="P15">⚠ 中等</text:p>
          </table:table-cell>
          <table:table-cell table:style-name="表格13.E2" office:value-type="string">
            <text:p text:style-name="P15">✅ 極高</text:p>
          </table:table-cell>
        </table:table-row>
        <table:table-row table:style-name="表格13.1">
          <table:table-cell table:style-name="表格13.A2" office:value-type="string">
            <text:p text:style-name="P14">使用者參與</text:p>
          </table:table-cell>
          <table:table-cell table:style-name="表格13.A2" office:value-type="string">
            <text:p text:style-name="P30">最初 + 最後</text:p>
          </table:table-cell>
          <table:table-cell table:style-name="表格13.C2" office:value-type="string">
            <text:p text:style-name="P30">全程高度參與</text:p>
          </table:table-cell>
          <table:table-cell table:style-name="表格13.D2" office:value-type="string">
            <text:p text:style-name="P30">每段結束</text:p>
          </table:table-cell>
          <table:table-cell table:style-name="表格13.E2" office:value-type="string">
            <text:p text:style-name="P30">每個 Sprint</text:p>
          </table:table-cell>
        </table:table-row>
        <table:table-row table:style-name="表格13.1">
          <table:table-cell table:style-name="表格13.A2" office:value-type="string">
            <text:p text:style-name="P14">文件完整度</text:p>
          </table:table-cell>
          <table:table-cell table:style-name="表格13.A2" office:value-type="string">
            <text:p text:style-name="P15">✅ 最完整</text:p>
          </table:table-cell>
          <table:table-cell table:style-name="表格13.C2" office:value-type="string">
            <text:p text:style-name="P15">⚠ 普通</text:p>
          </table:table-cell>
          <table:table-cell table:style-name="表格13.D2" office:value-type="string">
            <text:p text:style-name="P15">⚠ 普通</text:p>
          </table:table-cell>
          <table:table-cell table:style-name="表格13.E2" office:value-type="string">
            <text:p text:style-name="P15">❌ 相對少</text:p>
          </table:table-cell>
        </table:table-row>
        <table:table-row table:style-name="表格13.1">
          <table:table-cell table:style-name="表格13.A2" office:value-type="string">
            <text:p text:style-name="P14">回饋修正機制</text:p>
          </table:table-cell>
          <table:table-cell table:style-name="表格13.A2" office:value-type="string">
            <text:p text:style-name="P15">❌ 沒有</text:p>
          </table:table-cell>
          <table:table-cell table:style-name="表格13.C2" office:value-type="string">
            <text:p text:style-name="P15">✅ 有</text:p>
          </table:table-cell>
          <table:table-cell table:style-name="表格13.D2" office:value-type="string">
            <text:p text:style-name="P15">❌ 不一定</text:p>
          </table:table-cell>
          <table:table-cell table:style-name="表格13.E2" office:value-type="string">
            <text:p text:style-name="P15">✅ 核心機制</text:p>
          </table:table-cell>
        </table:table-row>
        <table:table-row table:style-name="表格13.1">
          <table:table-cell table:style-name="表格13.A2" office:value-type="string">
            <text:p text:style-name="P14">適合需求穩定？</text:p>
          </table:table-cell>
          <table:table-cell table:style-name="表格13.A2" office:value-type="string">
            <text:p text:style-name="P15">✅ 最適合</text:p>
          </table:table-cell>
          <table:table-cell table:style-name="表格13.C2" office:value-type="string">
            <text:p text:style-name="P15">❌ 適合不確定</text:p>
          </table:table-cell>
          <table:table-cell table:style-name="表格13.D2" office:value-type="string">
            <text:p text:style-name="P15">⚠ 可以</text:p>
          </table:table-cell>
          <table:table-cell table:style-name="表格13.E2" office:value-type="string">
            <text:p text:style-name="P15">✅ 適合多變</text:p>
          </table:table-cell>
        </table:table-row>
        <table:table-row table:style-name="表格13.1">
          <table:table-cell table:style-name="表格13.A2" office:value-type="string">
            <text:p text:style-name="P14">有固定流程規範？</text:p>
          </table:table-cell>
          <table:table-cell table:style-name="表格13.A2" office:value-type="string">
            <text:p text:style-name="P15">⚠ 有階段流程</text:p>
          </table:table-cell>
          <table:table-cell table:style-name="表格13.C2" office:value-type="string">
            <text:p text:style-name="P15">⚠ 有循環模式</text:p>
          </table:table-cell>
          <table:table-cell table:style-name="表格13.D2" office:value-type="string">
            <text:p text:style-name="P15">❌ 不規定</text:p>
          </table:table-cell>
          <table:table-cell table:style-name="表格13.E2" office:value-type="string">
            <text:p text:style-name="P15">✅ 有（Scrum等）</text:p>
          </table:table-cell>
        </table:table-row>
      </table:table>
      <text:p text:style-name="P10"/>
      <text:p text:style-name="P21">8.2 Scrum vs Incremental（最容易混淆）</text:p>
      <text:p text:style-name="P12"/>
      <text:p text:style-name="P6"><text:s text:c="2"/>📌 <text:s/>重點整理</text:p>
      <text:p text:style-name="P7"><text:s text:c="2"/>正確的層級理解：</text:p>
      <text:p text:style-name="P7"><text:s text:c="2"/>• Incremental = 開發「策略」層面：系統如何被分段交付</text:p>
      <text:p text:style-name="P7"><text:s text:c="2"/>• Scrum <text:s text:c="6"/>= 開發「方法論」層面：團隊如何組織、如何工作</text:p>
      <text:p text:style-name="P37"/>
      <text:p text:style-name="P7"><text:s text:c="2"/>Scrum 裡面「包含」Incremental 的概念——每個 Sprint 都產出一個 Increment（漸增成果）</text:p>
      <text:p text:style-name="P7"><text:s text:c="2"/>但反過來，Incremental 不一定用 Scrum（可以配合瀑布式計畫來做漸增交付）</text:p>
      <text:p text:style-name="P37"/>
      <text:p text:style-name="P8"><text:s text:c="2"/>→ Scrum 是 Iterative（反覆修正）+ Incremental（漸增功能）的結合</text:p>
      <text:p text:style-name="P10"/>
      <text:p text:style-name="P21">8.3 優缺點快速記憶</text:p>
      <text:p text:style-name="P12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13">模型</text:p>
          </table:table-cell>
          <table:table-cell table:style-name="表格14.B1" office:value-type="string">
            <text:p text:style-name="P13">✅ <text:s/>優點</text:p>
          </table:table-cell>
          <table:table-cell table:style-name="表格14.C1" office:value-type="string">
            <text:p text:style-name="P13">❌ <text:s/>缺點</text:p>
          </table:table-cell>
        </table:table-row>
        <table:table-row table:style-name="表格14.1">
          <table:table-cell table:style-name="表格14.A2" office:value-type="string">
            <text:p text:style-name="P14">瀑布</text:p>
          </table:table-cell>
          <table:table-cell table:style-name="表格14.B2" office:value-type="string">
            <text:p text:style-name="P15">文件完整、管理容易、適合需求穩定系統</text:p>
          </table:table-cell>
          <table:table-cell table:style-name="表格14.C2" office:value-type="string">
            <text:p text:style-name="P15">彈性差、使用者很晚看到成品、需求錯了代價很高</text:p>
          </table:table-cell>
        </table:table-row>
        <table:table-row table:style-name="表格14.1">
          <table:table-cell table:style-name="表格14.A3" office:value-type="string">
            <text:p text:style-name="P14">雛型</text:p>
          </table:table-cell>
          <table:table-cell table:style-name="表格14.B2" office:value-type="string">
            <text:p text:style-name="P15">需求確認快、減少做錯的風險</text:p>
          </table:table-cell>
          <table:table-cell table:style-name="表格14.C2" office:value-type="string">
            <text:p text:style-name="P15">可能忽略架構設計、客戶誤以為原型是最終產品</text:p>
          </table:table-cell>
        </table:table-row>
        <table:table-row table:style-name="表格14.1">
          <table:table-cell table:style-name="表格14.B2" office:value-type="string">
            <text:p text:style-name="P14">漸增</text:p>
          </table:table-cell>
          <table:table-cell table:style-name="表格14.B2" office:value-type="string">
            <text:p text:style-name="P15">早期交付、風險分散、系統逐步可用</text:p>
          </table:table-cell>
          <table:table-cell table:style-name="表格14.C2" office:value-type="string">
            <text:p text:style-name="P15">整合複雜度高、需良好架構規劃</text:p>
          </table:table-cell>
        </table:table-row>
        <table:table-row table:style-name="表格14.1">
          <table:table-cell table:style-name="表格14.A5" office:value-type="string">
            <text:p text:style-name="P14">敏捷</text:p>
          </table:table-cell>
          <table:table-cell table:style-name="表格14.B2" office:value-type="string">
            <text:p text:style-name="P15">快速回饋、應對變化、使用者滿意度高</text:p>
          </table:table-cell>
          <table:table-cell table:style-name="表格14.C2" office:value-type="string">
            <text:p text:style-name="P15">文件少、需高度協作能力、不適合需求固定的大型系統</text:p>
          </table:table-cell>
        </table:table-row>
      </table:table>
      <text:p text:style-name="P10"/>
      <text:p text:style-name="Standard"/>
      <text:p text:style-name="P9"><text:s text:c="2"/>第九章：考試關鍵一句話總整理</text:p>
      <text:p text:style-name="P10"/>
      <text:p text:style-name="P38"><text:s text:c="2"/>💡 <text:s/>考試技巧</text:p>
      <text:p text:style-name="P39">每個模型的「考試標準答案」：</text:p>
      <text:p text:style-name="P40"/>
      <text:p text:style-name="P39">【瀑布模型】</text:p>
      <text:p text:style-name="P39"><text:s text:c="3"/>瀑布模型為線性循序式開發流程，各階段依序執行且不重疊，</text:p>
      <text:p text:style-name="P39"><text:s text:c="3"/>文件完整、管理容易，適用於需求穩定且清楚的大型系統開發。</text:p>
      <text:p text:style-name="P40"/>
      <text:p text:style-name="P39">【雛型模型】</text:p>
      <text:p text:style-name="P39"><text:s text:c="3"/>雛型模型先快速建立原型供使用者評估，根據回饋反覆修正，</text:p>
      <text:p text:style-name="P39"><text:s text:c="3"/>有助於需求確認，適用於需求不明確或強調使用者互動的系統。</text:p>
      <text:p text:style-name="P40"/>
      <text:p text:style-name="P39">【漸增模型】</text:p>
      <text:p text:style-name="P39"><text:s text:c="3"/>漸增模型將系統分為多個子系統逐段開發，每階段皆可交付可運作的版本，</text:p>
      <text:p text:style-name="P39"><text:s text:c="3"/>功能逐步累加，適合需求複雜且可能持續擴充的系統。</text:p>
      <text:p text:style-name="P40"/>
      <text:p text:style-name="P39">【敏捷開發】</text:p>
      <text:p text:style-name="P39"><text:s text:c="3"/>敏捷開發以短週期迭代、持續交付、快速回饋為核心，</text:p>
      <text:p text:style-name="P39"><text:s text:c="3"/>強調彈性與跨功能團隊協作，常見方法包含 Scrum、Kanban、XP、Lean。</text:p>
      <text:p text:style-name="P40"/>
      <text:p text:style-name="P39">【Scrum vs 漸增 關係說明】</text:p>
      <text:p text:style-name="P39"><text:s text:c="3"/>Scrum 是敏捷方法論，融合漸增（分段交付）與迭代（反覆修正）；</text:p>
      <text:p text:style-name="P41"><text:s text:c="3"/>漸增是開發策略，指系統分段可交付，不一定包含敏捷的回饋修正機制。</text:p>
      <text:p text:style-name="P10"/>
      <text:p text:style-name="P21">9.1 關鍵詞速查</text:p>
      <text:p text:style-name="P12"/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13">考題出現這個詞…</text:p>
          </table:table-cell>
          <table:table-cell table:style-name="表格15.A1" office:value-type="string">
            <text:p text:style-name="P13">聯想到這個模型 / 概念</text:p>
          </table:table-cell>
        </table:table-row>
        <table:table-row table:style-name="表格15.1">
          <table:table-cell table:style-name="表格15.A2" office:value-type="string">
            <text:p text:style-name="P15">線性、不能回頭、文件完整</text:p>
          </table:table-cell>
          <table:table-cell table:style-name="表格15.B2" office:value-type="string">
            <text:p text:style-name="P42">→ 瀑布模型</text:p>
          </table:table-cell>
        </table:table-row>
        <table:table-row table:style-name="表格15.1">
          <table:table-cell table:style-name="表格15.A2" office:value-type="string">
            <text:p text:style-name="P15">需求不確定、先做原型、使用者回饋</text:p>
          </table:table-cell>
          <table:table-cell table:style-name="表格15.B2" office:value-type="string">
            <text:p text:style-name="P42">→ 雛型模型</text:p>
          </table:table-cell>
        </table:table-row>
        <table:table-row table:style-name="表格15.1">
          <table:table-cell table:style-name="表格15.A2" office:value-type="string">
            <text:p text:style-name="P15">分段交付、每段可運作、功能累加</text:p>
          </table:table-cell>
          <table:table-cell table:style-name="表格15.B2" office:value-type="string">
            <text:p text:style-name="P42">→ 漸增模型</text:p>
          </table:table-cell>
        </table:table-row>
        <table:table-row table:style-name="表格15.1">
          <table:table-cell table:style-name="表格15.A2" office:value-type="string">
            <text:p text:style-name="P15">短週期、迭代、持續交付、高彈性</text:p>
          </table:table-cell>
          <table:table-cell table:style-name="表格15.B2" office:value-type="string">
            <text:p text:style-name="P42">→ 敏捷開發</text:p>
          </table:table-cell>
        </table:table-row>
        <table:table-row table:style-name="表格15.1">
          <table:table-cell table:style-name="表格15.A2" office:value-type="string">
            <text:p text:style-name="P15">Sprint、Product Owner、Backlog</text:p>
          </table:table-cell>
          <table:table-cell table:style-name="表格15.B2" office:value-type="string">
            <text:p text:style-name="P42">→ Scrum</text:p>
          </table:table-cell>
        </table:table-row>
        <table:table-row table:style-name="表格15.1">
          <table:table-cell table:style-name="表格15.A2" office:value-type="string">
            <text:p text:style-name="P15">看板、WIP 限制、可視化</text:p>
          </table:table-cell>
          <table:table-cell table:style-name="表格15.B2" office:value-type="string">
            <text:p text:style-name="P42">→ Kanban</text:p>
          </table:table-cell>
        </table:table-row>
        <table:table-row table:style-name="表格15.1">
          <table:table-cell table:style-name="表格15.A2" office:value-type="string">
            <text:p text:style-name="P15">TDD、結對程式設計、持續整合</text:p>
          </table:table-cell>
          <table:table-cell table:style-name="表格15.B2" office:value-type="string">
            <text:p text:style-name="P42">→ XP（Extreme Programming）</text:p>
          </table:table-cell>
        </table:table-row>
        <table:table-row table:style-name="表格15.1">
          <table:table-cell table:style-name="表格15.A2" office:value-type="string">
            <text:p text:style-name="P15">消除浪費、MVP、最小可行產品</text:p>
          </table:table-cell>
          <table:table-cell table:style-name="表格15.B2" office:value-type="string">
            <text:p text:style-name="P42">→ Lean 精實開發</text:p>
          </table:table-cell>
        </table:table-row>
        <table:table-row table:style-name="表格15.1">
          <table:table-cell table:style-name="表格15.A2" office:value-type="string">
            <text:p text:style-name="P15">Iterative + Incremental</text:p>
          </table:table-cell>
          <table:table-cell table:style-name="表格15.B2" office:value-type="string">
            <text:p text:style-name="P42">→ Scrum（兩者兼具）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a1a1a" loext:opacity="10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a1a1a" loext:opacity="10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247cm" style:contextual-spacing="false"/>
      <style:text-properties fo:color="#ffffff" loext:opacity="100%" style:font-name="Arial1" fo:font-family="Arial" style:font-family-generic="swiss" style:font-pitch="variable" fo:font-size="19pt" fo:font-weight="bold" style:font-name-asian="Arial2" style:font-family-asian="Arial" style:font-family-generic-asian="system" style:font-pitch-asian="variable" style:font-size-asian="19pt" style:font-weight-asian="bold" style:font-name-complex="Arial2" style:font-family-complex="Arial" style:font-family-generic-complex="system" style:font-pitch-complex="variable" style:font-size-complex="19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176cm" style:contextual-spacing="false"/>
      <style:text-properties fo:color="#1b3a6b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4</meta:editing-cycles>
    <meta:creation-date>2026-04-26T03:06:00.967000000</meta:creation-date>
    <dc:date>2026-06-21T12:38:22.825411400</dc:date>
    <meta:generator>LibreOffice/26.2.4.2$Windows_X86_64 LibreOffice_project/0229ac93fcf0d7cbc6376066c6f35021cef002dc</meta:generator>
    <meta:editing-duration>PT16H48M34S</meta:editing-duration>
    <meta:document-statistic meta:table-count="15" meta:image-count="0" meta:object-count="0" meta:page-count="11" meta:paragraph-count="364" meta:word-count="4576" meta:character-count="6695" meta:non-whitespace-character-count="5878"/>
  </office:meta>
</office:document-meta>
</file>