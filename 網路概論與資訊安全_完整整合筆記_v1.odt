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cm"/>
    </style:style>
    <style:style style:name="表格14.D" style:family="table-column">
      <style:table-column-properties style:column-width="2.649cm"/>
    </style:style>
    <style:style style:name="表格14.E" style:family="table-column">
      <style:table-column-properties style:column-width="2.642cm"/>
    </style:style>
    <style:style style:name="表格14.F" style:family="table-column">
      <style:table-column-properties style:column-width="5.11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4cm"/>
    </style:style>
    <style:style style:name="表格16.C" style:family="table-column">
      <style:table-column-properties style:column-width="6.971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2cm"/>
    </style:style>
    <style:style style:name="表格17.B" style:family="table-column">
      <style:table-column-properties style:column-width="3.267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6cm"/>
    </style:style>
    <style:style style:name="表格19.B" style:family="table-column">
      <style:table-column-properties style:column-width="3.531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7cm"/>
    </style:style>
    <style:style style:name="表格20.D" style:family="table-column">
      <style:table-column-properties style:column-width="3.884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3cm"/>
    </style:style>
    <style:style style:name="表格21.C" style:family="table-column">
      <style:table-column-properties style:column-width="10.23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1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2cm"/>
    </style:style>
    <style:style style:name="表格23.C" style:family="table-column">
      <style:table-column-properties style:column-width="7.05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8cm"/>
    </style:style>
    <style:style style:name="表格24.B" style:family="table-column">
      <style:table-column-properties style:column-width="7.235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7cm"/>
    </style:style>
    <style:style style:name="表格27.C" style:family="table-column">
      <style:table-column-properties style:column-width="7.05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8cm"/>
    </style:style>
    <style:style style:name="表格28.B" style:family="table-column">
      <style:table-column-properties style:column-width="4.413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7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4cm"/>
    </style:style>
    <style:style style:name="表格32.B" style:family="table-column">
      <style:table-column-properties style:column-width="6.706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6cm"/>
    </style:style>
    <style:style style:name="表格34.B" style:family="table-column">
      <style:table-column-properties style:column-width="2.297cm"/>
    </style:style>
    <style:style style:name="表格34.C" style:family="table-column">
      <style:table-column-properties style:column-width="8.287cm"/>
    </style:style>
    <style:style style:name="表格34.D" style:family="table-column">
      <style:table-column-properties style:column-width="3.884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9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9cm"/>
    </style:style>
    <style:style style:name="表格39.D" style:family="table-column">
      <style:table-column-properties style:column-width="3.877cm"/>
    </style:style>
    <style:style style:name="表格39.E" style:family="table-column">
      <style:table-column-properties style:column-width="3.884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9cm"/>
    </style:style>
    <style:style style:name="表格40.B" style:family="table-column">
      <style:table-column-properties style:column-width="2.649cm"/>
    </style:style>
    <style:style style:name="表格40.C" style:family="table-column">
      <style:table-column-properties style:column-width="2.642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7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8cm"/>
    </style:style>
    <style:style style:name="表格44.B" style:family="table-column">
      <style:table-column-properties style:column-width="1.591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9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4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8cm"/>
    </style:style>
    <style:style style:name="表格49.D" style:family="table-column">
      <style:table-column-properties style:column-width="7.235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4cm"/>
    </style:style>
    <style:style style:name="表格50.C" style:family="table-column">
      <style:table-column-properties style:column-width="3.884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7cm"/>
    </style:style>
    <style:style style:name="表格51.D" style:family="table-column">
      <style:table-column-properties style:column-width="5.11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3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1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4cm"/>
    </style:style>
    <style:style style:name="表格54.C" style:family="table-column">
      <style:table-column-properties style:column-width="7.05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3cm"/>
    </style:style>
    <style:style style:name="表格55.B" style:family="table-column">
      <style:table-column-properties style:column-width="12.351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4cm"/>
    </style:style>
    <style:style style:name="表格57.C" style:family="table-column">
      <style:table-column-properties style:column-width="6.971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3cm"/>
    </style:style>
    <style:style style:name="表格62.B" style:family="table-column">
      <style:table-column-properties style:column-width="12.351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8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7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3cm"/>
    </style:style>
    <style:style style:name="表格64.D" style:family="table-column">
      <style:table-column-properties style:column-width="3.884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3cm"/>
    </style:style>
    <style:style style:name="表格66.B" style:family="table-column">
      <style:table-column-properties style:column-width="5.135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9cm"/>
    </style:style>
    <style:style style:name="表格67.C" style:family="table-column">
      <style:table-column-properties style:column-width="7.05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cm"/>
    </style:style>
    <style:style style:name="表格69.C" style:family="table-column">
      <style:table-column-properties style:column-width="7.05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2cm"/>
    </style:style>
    <style:style style:name="表格70.C" style:family="table-column">
      <style:table-column-properties style:column-width="7.05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8cm"/>
    </style:style>
    <style:style style:name="表格73.F" style:family="table-column">
      <style:table-column-properties style:column-width="4.06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4cm"/>
    </style:style>
    <style:style style:name="表格74.C" style:family="table-column">
      <style:table-column-properties style:column-width="4.766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9cm"/>
    </style:style>
    <style:style style:name="表格75.C" style:family="table-column">
      <style:table-column-properties style:column-width="3.531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9cm"/>
    </style:style>
    <style:style style:name="表格76.C" style:family="table-column">
      <style:table-column-properties style:column-width="7.059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1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6cm"/>
    </style:style>
    <style:style style:name="表格80.C" style:family="table-column">
      <style:table-column-properties style:column-width="4.942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9cm"/>
    </style:style>
    <style:style style:name="表格83.B" style:family="table-column">
      <style:table-column-properties style:column-width="3.708cm"/>
    </style:style>
    <style:style style:name="表格83.C" style:family="table-column">
      <style:table-column-properties style:column-width="5.817cm"/>
    </style:style>
    <style:style style:name="表格83.D" style:family="table-column">
      <style:table-column-properties style:column-width="5.11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8cm"/>
    </style:style>
    <style:style style:name="表格84.B" style:family="table-column">
      <style:table-column-properties style:column-width="4.766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5cm"/>
    </style:style>
    <style:style style:name="表格92.C" style:family="table-column">
      <style:table-column-properties style:column-width="6.883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9cm"/>
    </style:style>
    <style:style style:name="表格94.B" style:family="table-column">
      <style:table-column-properties style:column-width="3.708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8cm"/>
    </style:style>
    <style:style style:name="表格96.B" style:family="table-column">
      <style:table-column-properties style:column-width="8.999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8cm"/>
    </style:style>
    <style:style style:name="表格98.C" style:family="table-column">
      <style:table-column-properties style:column-width="4.06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5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cm"/>
    </style:style>
    <style:style style:name="表格105.B" style:family="table-column">
      <style:table-column-properties style:column-width="5.824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8cm"/>
    </style:style>
    <style:style style:name="表格107.B" style:family="table-column">
      <style:table-column-properties style:column-width="6.795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5cm"/>
    </style:style>
    <style:style style:name="表格108.B" style:family="table-column">
      <style:table-column-properties style:column-width="0.1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8cm"/>
    </style:style>
    <style:style style:name="表格111.B" style:family="table-column">
      <style:table-column-properties style:column-width="13.585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3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7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7cm"/>
    </style:style>
    <style:style style:name="表格114.D" style:family="table-column">
      <style:table-column-properties style:column-width="3.884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8cm"/>
    </style:style>
    <style:style style:name="表格116.B" style:family="table-column">
      <style:table-column-properties style:column-width="4.413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6cm"/>
    </style:style>
    <style:style style:name="表格120.B" style:family="table-column">
      <style:table-column-properties style:column-width="4.766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9cm"/>
    </style:style>
    <style:style style:name="表格121.B" style:family="table-column">
      <style:table-column-properties style:column-width="3.884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8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8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6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8cm"/>
    </style:style>
    <style:style style:name="表格125.C" style:family="table-column">
      <style:table-column-properties style:column-width="7.059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1cm"/>
    </style:style>
    <style:style style:name="表格127.C" style:family="table-column">
      <style:table-column-properties style:column-width="7.235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7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8cm"/>
    </style:style>
    <style:style style:name="表格134.B" style:family="table-column">
      <style:table-column-properties style:column-width="6.795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4cm"/>
    </style:style>
    <style:style style:name="表格139.C" style:family="table-column">
      <style:table-column-properties style:column-width="6.971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3cm"/>
    </style:style>
    <style:style style:name="表格140.B" style:family="table-column">
      <style:table-column-properties style:column-width="1.591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cm" fo:margin-bottom="0.353cm" style:contextual-spacing="false"/>
    </style:style>
    <style:style style:name="P8" style:family="paragraph" style:parent-style-name="Standard">
      <style:paragraph-properties fo:margin-top="0.035cm" fo:margin-bottom="0.106cm" style:contextual-spacing="false" fo:line-height="0.459cm"/>
    </style:style>
    <style:style style:name="P9" style:family="paragraph" style:parent-style-name="Standard">
      <style:paragraph-properties fo:margin-top="0cm" fo:margin-bottom="0.042cm" style:contextual-spacing="false" fo:line-height="0.455cm"/>
    </style:style>
    <style:style style:name="P10" style:family="paragraph" style:parent-style-name="Standard">
      <style:paragraph-properties fo:margin-top="0.042cm" fo:margin-bottom="0.042cm" style:contextual-spacing="false" fo:line-height="0.455cm"/>
    </style:style>
    <style:style style:name="P11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4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17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18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19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20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22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26" style:family="paragraph" style:parent-style-name="Standard">
      <style:paragraph-properties fo:margin-top="0.042cm" fo:margin-bottom="0.042cm" style:contextual-spacing="false" fo:line-height="0.455cm"/>
    </style:style>
    <style:style style:name="P27" style:family="paragraph" style:parent-style-name="Standard">
      <style:paragraph-properties fo:margin-top="0cm" fo:margin-bottom="0.042cm" style:contextual-spacing="false" fo:line-height="0.455cm"/>
    </style:style>
    <style:style style:name="P28" style:family="paragraph" style:parent-style-name="Standard">
      <style:paragraph-properties fo:margin-top="0cm" fo:margin-bottom="0.212cm" style:contextual-spacing="false" fo:break-before="page"/>
    </style:style>
    <style:style style:name="P29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0" style:family="paragraph" style:parent-style-name="Standard">
      <style:paragraph-properties fo:margin-top="0.035cm" fo:margin-bottom="0.106cm" style:contextual-spacing="false" fo:line-height="0.459cm"/>
    </style:style>
    <style:style style:name="P31" style:family="paragraph" style:parent-style-name="Standard">
      <style:paragraph-properties fo:margin-top="0.035cm" fo:margin-bottom="0.106cm" style:contextual-spacing="false" fo:line-height="0.459cm"/>
      <style:text-properties officeooo:paragraph-rsid="0016bf9a"/>
    </style:style>
    <style:style style:name="P32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4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5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38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2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3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44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5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46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47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5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56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57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58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9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63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4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67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68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9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0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3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4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6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7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8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9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0" style:family="text">
      <style:text-properties fo:color="#2b2b2b" loext:opacity="100%" style:font-name="Microsoft JhengHei" fo:font-size="9.5pt" fo:font-style="normal" fo:font-weight="normal" fo:background-color="#1b5e2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1" style:family="text">
      <style:text-properties fo:color="#2b2b2b" loext:opacity="100%" style:font-name="Microsoft JhengHei" fo:font-size="9.5pt" fo:font-style="normal" fo:font-weight="normal" fo:background-color="#1b5e2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2" style:family="text">
      <style:text-properties fo:color="#2b2b2b" loext:opacity="100%" style:font-name="Microsoft JhengHei" fo:font-size="9.5pt" fo:font-style="normal" fo:font-weight="normal" fo:background-color="#3d5af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3" style:family="text">
      <style:text-properties fo:color="#2b2b2b" loext:opacity="100%" style:font-name="Microsoft JhengHei" fo:font-size="9.5pt" fo:font-style="normal" fo:font-weight="normal" fo:background-color="#3d5af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4" style:family="text">
      <style:text-properties fo:color="#2b2b2b" loext:opacity="100%" style:font-name="Microsoft JhengHei" fo:font-size="9.5pt" fo:font-style="normal" fo:font-weight="normal" fo:background-color="#64ffda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5" style:family="text">
      <style:text-properties fo:color="#2b2b2b" loext:opacity="100%" style:font-name="Microsoft JhengHei" fo:font-size="9.5pt" fo:font-style="normal" fo:font-weight="normal" fo:background-color="#64ffda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6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7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0" style:family="text">
      <style:text-properties fo:color="#2b2b2b" loext:opacity="100%" style:font-name="Microsoft JhengHei" fo:font-size="10.5pt" fo:font-style="normal" fo:font-weight="normal" officeooo:rsid="0017a81f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2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3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4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5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6" style:family="text">
      <style:text-properties fo:color="#2b2b2b" loext:opacity="100%" style:font-name="Microsoft JhengHei" fo:font-size="10.5pt" fo:font-style="normal" fo:font-weight="normal" fo:background-color="#b71c1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7" style:family="text">
      <style:text-properties fo:color="#2b2b2b" loext:opacity="100%" style:font-name="Microsoft JhengHei" fo:font-size="10.5pt" fo:font-style="normal" fo:font-weight="normal" fo:background-color="#b71c1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8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9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0" style:family="text">
      <style:text-properties fo:color="#2b2b2b" loext:opacity="100%" style:font-name="Microsoft JhengHei" fo:font-size="10.5pt" fo:font-style="normal" fo:font-weight="normal" fo:background-color="#0d47a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1" style:family="text">
      <style:text-properties fo:color="#2b2b2b" loext:opacity="100%" style:font-name="Microsoft JhengHei" fo:font-size="10.5pt" fo:font-style="normal" fo:font-weight="normal" fo:background-color="#0d47a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2" style:family="text">
      <style:text-properties fo:color="#2b2b2b" loext:opacity="100%" style:font-name="Microsoft JhengHei" fo:font-size="10.5pt" fo:font-style="normal" fo:font-weight="normal" fo:background-color="#64ffda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3" style:family="text">
      <style:text-properties fo:color="#2b2b2b" loext:opacity="100%" style:font-name="Microsoft JhengHei" fo:font-size="10.5pt" fo:font-style="normal" fo:font-weight="normal" fo:background-color="#64ffda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4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0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1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25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2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7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8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9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0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1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2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3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4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5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6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37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38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39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40" style:family="text">
      <style:text-properties fo:color="#2b2b2b" loext:opacity="100%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41" style:family="text">
      <style:text-properties fo:color="#2b2b2b" loext:opacity="100%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42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3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4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5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6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8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9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0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1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3" style:family="text">
      <style:text-properties fo:color="#2b2b2b" loext:opacity="100%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4" style:family="text">
      <style:text-properties fo:color="#2b2b2b" loext:opacity="100%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5" style:family="text">
      <style:text-properties fo:color="#2b2b2b" loext:opacity="100%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6" style:family="text">
      <style:text-properties fo:color="#2b2b2b" loext:opacity="100%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7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2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3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4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5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6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7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68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69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70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7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2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3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4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75" style:family="text">
      <style:text-properties fo:color="#2b2b2b" loext:opacity="100%" style:font-name="OpenSymbol" fo:font-size="10.5pt" fo:font-style="normal" fo:font-weight="normal" officeooo:rsid="0017a81f" style:font-name-asian="OpenSymbol" style:font-size-asian="10.5pt" style:font-style-asian="normal" style:font-weight-asian="normal" style:font-name-complex="OpenSymbol" style:font-size-complex="10.5pt" style:font-style-complex="normal" style:font-weight-complex="normal"/>
    </style:style>
    <style:style style:name="T176" style:family="text">
      <style:text-properties fo:font-size="11pt" style:font-name-asian="Microsoft JhengHei2" style:font-size-asian="11pt" style:font-name-complex="Microsoft JhengHei2" style:font-size-complex="11pt"/>
    </style:style>
    <style:style style:name="T177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17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7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0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81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182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183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6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87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8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89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90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91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2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3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4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5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6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7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8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9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2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3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5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06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07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8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1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12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13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4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16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17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18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20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21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23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24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25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2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27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9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0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1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2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33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4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37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38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1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2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3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4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6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48" style:family="text">
      <style:text-properties fo:color="#18ffff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49" style:family="text">
      <style:text-properties fo:color="#18ffff" loext:opacity="100%" fo:font-size="9.5pt" fo:font-style="normal" fo:font-weight="normal" fo:background-color="#d500f9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50" style:family="text">
      <style:text-properties fo:color="#18ffff" loext:opacity="100%" fo:font-size="9.5pt" fo:font-style="normal" fo:font-weight="normal" fo:background-color="#d500f9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51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2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3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4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5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7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8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9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0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1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2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3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4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5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3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4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6" style:family="text">
      <style:text-properties fo:color="#18ffff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7" style:family="text">
      <style:text-properties fo:color="#18ffff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78" style:family="text">
      <style:text-properties fo:color="#18ffff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79" style:family="text">
      <style:text-properties fo:color="#18ffff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80" style:family="text">
      <style:text-properties fo:color="#18ffff" loext:opacity="100%" style:font-name="Microsoft JhengHei" fo:font-size="10.5pt" fo:font-style="normal" fo:font-weight="normal" fo:background-color="#0d47a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81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282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283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8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9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0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18ffff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4" style:family="text">
      <style:text-properties fo:color="#18ffff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5" style:family="text">
      <style:text-properties fo:color="#18ffff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6" style:family="text">
      <style:text-properties fo:color="#18ffff" loext:opacity="100%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7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98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99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3" style:family="text">
      <style:text-properties fo:color="#ff3d00" loext:opacity="100%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304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5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6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7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8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9" style:family="text">
      <style:text-properties fo:color="#ff3d00" loext:opacity="100%" style:font-name="Microsoft JhengHei" fo:font-size="9.5pt" fo:font-style="normal" fo:font-weight="normal" fo:background-color="#64ffda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310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1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2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3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4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6" style:family="text">
      <style:text-properties fo:color="#ff3d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7" style:family="text">
      <style:text-properties fo:color="#ff3d00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18" style:family="text">
      <style:text-properties fo:color="#ff3d00" loext:opacity="100%" style:font-name="Microsoft JhengHei" fo:font-size="10.5pt" fo:font-style="normal" fo:font-weight="normal" fo:background-color="#64ffda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19" style:family="text">
      <style:text-properties fo:color="#ff3d00" loext:opacity="100%" style:font-name="Microsoft JhengHei" fo:font-size="10.5pt" fo:font-style="normal" fo:font-weight="normal" fo:background-color="#64ffda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0" style:family="text">
      <style:text-properties fo:color="#ff3d00" loext:opacity="100%" style:font-name="Microsoft JhengHei" fo:font-size="10.5pt" fo:font-style="normal" fo:font-weight="normal" fo:background-color="#b71c1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1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2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3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4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7" style:family="text">
      <style:text-properties fo:color="#ff3d00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8" style:family="text">
      <style:text-properties fo:color="#ff3d00" loext:opacity="100%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9" style:family="text">
      <style:text-properties fo:color="#ff3d00" loext:opacity="100%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0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1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2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5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9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340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41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2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3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4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1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8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0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1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2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3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4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6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7" style:family="text">
      <style:text-properties fo:color="#76ff03" loext:opacity="100%" style:font-name="Microsoft JhengHei" fo:font-size="9.5pt" fo:font-style="normal" fo:font-weight="normal" fo:background-color="#1b5e2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368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9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0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1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2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4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7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8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9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0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1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2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84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7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8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9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0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1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2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4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5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96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8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0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1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2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3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4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6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7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8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9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0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1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2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3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4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6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7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8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9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3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4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5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6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7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8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9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0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6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7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8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9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0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455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456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7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8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0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1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6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7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8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9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2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4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0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1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2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3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4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6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7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7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8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9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0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1" style:family="text">
      <style:text-properties fo:color="#ffea00" loext:opacity="100%" style:font-name="Microsoft JhengHei" fo:font-size="9.5pt" fo:font-style="normal" fo:font-weight="normal" fo:background-color="#3d5af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502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3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8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9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0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5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6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7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1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2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3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4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5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6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27" style:family="text">
      <style:text-properties fo:color="#64ffda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28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9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1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2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4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5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0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1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2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3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4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5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6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7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8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9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1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3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8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9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0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1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2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3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4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6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7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8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9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0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1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9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7" loext:marker-style-name="T22"><text:span text:style-name="T21">公職考試 </text:span><text:span text:style-name="T37">· </text:span><text:span text:style-name="T21">資訊類</text:span></text:p>
      <text:p text:style-name="P18" loext:marker-style-name="T42"><text:span text:style-name="T41">網路概論 與 資訊安全</text:span><text:span text:style-name="T42"/></text:p>
      <text:p text:style-name="P19" loext:marker-style-name="T44"><text:span text:style-name="T43">完整整合筆記 </text:span><text:span text:style-name="T57">· </text:span><text:span text:style-name="T43">最終版</text:span></text:p>
      <text:p text:style-name="P20" loext:marker-style-name="T4"><text:span text:style-name="T14">OSI / TCP/IP ‧ IP </text:span><text:span text:style-name="T3">子網 ‧ </text:span><text:span text:style-name="T14">IPv6 ‧ ARP/NAT ‧ TCP ‧ DNS ‧ </text:span><text:span text:style-name="T3">路由 ‧ </text:span><text:span text:style-name="T14">SDN/CDN/5G ‧ </text:span><text:span text:style-name="T3">無線 ‧ 資安全攻防</text:span>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2" loext:marker-style-name="T65"><text:span text:style-name="T64">涵蓋十大主題</text:span><text:span text:style-name="T65"/></text:p>
            </table:table-cell>
            <table:table-cell table:style-name="表格1.A1" office:value-type="string">
              <text:p text:style-name="P22" loext:marker-style-name="T65"><text:span text:style-name="T64">前置速記</text:span><text:span text:style-name="T65"/></text:p>
            </table:table-cell>
            <table:table-cell table:style-name="表格1.A1" office:value-type="string">
              <text:p text:style-name="P22" loext:marker-style-name="T65"><text:span text:style-name="T64">全程對照</text:span><text:span text:style-name="T65"/></text:p>
            </table:table-cell>
            <table:table-cell table:style-name="表格1.A1" office:value-type="string">
              <text:p text:style-name="P22" loext:marker-style-name="T65"><text:span text:style-name="T64">考試導向</text:span><text:span text:style-name="T65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4" loext:marker-style-name="T78"><text:span text:style-name="T77">十篇章節</text:span><text:span text:style-name="T78"/></text:p>
          </table:table-cell>
          <table:table-cell table:style-name="表格1.A2" office:value-type="string">
            <text:p text:style-name="P24" loext:marker-style-name="T78"><text:span text:style-name="T77">口訣 </text:span><text:span text:style-name="T138">+ </text:span><text:span text:style-name="T77">表格</text:span></text:p>
          </table:table-cell>
          <table:table-cell table:style-name="表格1.A2" office:value-type="string">
            <text:p text:style-name="P24" loext:marker-style-name="T78"><text:span text:style-name="T77">陷阱 </text:span><text:span text:style-name="T138">+ </text:span><text:span text:style-name="T77">正解</text:span></text:p>
          </table:table-cell>
          <table:table-cell table:style-name="表格1.A2" office:value-type="string">
            <text:p text:style-name="P24" loext:marker-style-name="T78"><text:span text:style-name="T77">申論 </text:span><text:span text:style-name="T138">+ </text:span><text:span text:style-name="T77">選擇</text:span></text:p>
          </table:table-cell>
        </table:table-row>
      </table:table>
      <text:p text:style-name="P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<text:span text:style-name="T176">📖 <text:s/></text:span><text:span text:style-name="T23">讀這份筆記的方法</text:span></text:p>
            <text:p text:style-name="P9"><text:span text:style-name="T24">使用方式：</text:span><text:span text:style-name="T99">第〇篇「考前速記總表」收錄全書所有口訣與必背表格，考前衝刺只看這篇即可；</text:span></text:p>
            <text:p text:style-name="P10" loext:marker-style-name="T101"><text:span text:style-name="T99">第一～十篇為完整詳解，建立觀念與申論寫法時閱讀。每篇皆附「常見陷阱」與「考試標準答案」。</text:span><text:span text:style-name="T101"/></text:p>
          </table:table-cell>
        </table:table-row>
      </table:table>
      <text:p text:style-name="P28" loext:marker-style-name="T46"><text:span text:style-name="T45">目　錄</text:span><text:span text:style-name="T46"/></text:p>
      <text:p text:style-name="P29" loext:marker-style-name="T5"><text:span text:style-name="T15">Table of Contents</text:span><text:span text:style-name="T5"/></text:p>
      <text:p text:style-name="P11"><text:span text:style-name="T23">第 〇 篇　考前速記總表 — 口訣 </text:span><text:span text:style-name="T38">× </text:span><text:span text:style-name="T23">必背表格</text:span><text:span text:style-name="T18"><text:tab/>3</text:span></text:p>
      <text:p text:style-name="P11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11"><text:span text:style-name="T9">　　</text:span><text:span text:style-name="T19">Part B</text:span><text:span text:style-name="T9">　必背表格精選</text:span><text:span text:style-name="T18"><text:tab/>5</text:span></text:p>
      <text:p text:style-name="P12"><text:span text:style-name="T47">第 一 篇　網路基礎架構：</text:span><text:span text:style-name="T58">OSI / TCP-IP · </text:span><text:span text:style-name="T47">協定 </text:span><text:span text:style-name="T58">· ARP · Traceroute</text:span><text:span text:style-name="T18"><text:tab/>9</text:span></text:p>
      <text:p text:style-name="P11"><text:span text:style-name="T47">第 二 篇　</text:span><text:span text:style-name="T58">IP </text:span><text:span text:style-name="T47">位址與封包處理：分類 </text:span><text:span text:style-name="T58">· CIDR · VLSM · Fragmentation</text:span><text:span text:style-name="T18"><text:tab/>13</text:span></text:p>
      <text:p text:style-name="P11"><text:span text:style-name="T47">第 三 篇　</text:span><text:span text:style-name="T58">IPv4 → IPv6 </text:span><text:span text:style-name="T47">過渡技術</text:span><text:span text:style-name="T18"><text:tab/>19</text:span></text:p>
      <text:p text:style-name="P11"><text:span text:style-name="T47">第 四 篇　</text:span><text:span text:style-name="T58">ARP</text:span><text:span text:style-name="T47">、</text:span><text:span text:style-name="T58">NAT </text:span><text:span text:style-name="T47">與完整上網流程</text:span><text:span text:style-name="T18"><text:tab/>21</text:span></text:p>
      <text:p text:style-name="P11"><text:span text:style-name="T47">第 五 篇　</text:span><text:span text:style-name="T58">TCP </text:span><text:span text:style-name="T47">傳輸控制深入</text:span><text:span text:style-name="T18"><text:tab/>24</text:span></text:p>
      <text:p text:style-name="P11"><text:span text:style-name="T47">第 六 篇　</text:span><text:span text:style-name="T58">DNS </text:span><text:span text:style-name="T47">與 </text:span><text:span text:style-name="T58">DNSSEC</text:span><text:span text:style-name="T18"><text:tab/>28</text:span></text:p>
      <text:p text:style-name="P11"><text:span text:style-name="T47">第 七 篇　路由協定：</text:span><text:span text:style-name="T58">OSPF </text:span><text:span text:style-name="T47">與 </text:span><text:span text:style-name="T58">BGP</text:span><text:span text:style-name="T18"><text:tab/>31</text:span></text:p>
      <text:p text:style-name="P11"><text:span text:style-name="T47">第 八 篇　網路系統進階：</text:span><text:span text:style-name="T58">SDN · LB · CDN · 5G</text:span><text:span text:style-name="T18"><text:tab/>34</text:span></text:p>
      <text:p text:style-name="P11"><text:span text:style-name="T47">第 九 篇　無線通訊：</text:span><text:span text:style-name="T58">WiFi vs Bluetooth</text:span><text:span text:style-name="T18"><text:tab/>37</text:span></text:p>
      <text:p text:style-name="P11"><text:span text:style-name="T47">第 十 篇　資訊安全：設備 </text:span><text:span text:style-name="T58">· </text:span><text:span text:style-name="T47">攻防 </text:span><text:span text:style-name="T58">· </text:span><text:span text:style-name="T47">企業資安 </text:span><text:span text:style-name="T58">· Zero Trust</text:span><text:span text:style-name="T18"><text:tab/>40</text:span></text:p>
      <text:p text:style-name="P12"><text:span text:style-name="T23">結　語　考前最後叮嚀</text:span><text:span text:style-name="T18"><text:tab/>51</text:span></text:p>
      <text:h text:style-name="P13" text:outline-level="1" loext:marker-style-name="T67"><text:span text:style-name="T66">第 〇 篇　考前速記總表 — 口訣 </text:span><text:span text:style-name="T67">× </text:span><text:span text:style-name="T66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<text:span text:style-name="T176">⚡ <text:s/></text:span><text:span text:style-name="T47">本篇用途</text:span></text:p>
            <text:p text:style-name="P9" loext:marker-style-name="T101"><text:span text:style-name="T99">這一篇把全書最關鍵的「記憶口訣」與「必背表格」依主題集中，方便考前快速複習；每一條後方括號為對應的詳解篇章。</text:span><text:span text:style-name="T101"/></text:p>
          </table:table-cell>
        </table:table-row>
      </table:table>
      <text:h text:style-name="P2" text:outline-level="2" loext:marker-style-name="T27"><text:span text:style-name="T27">Part A</text:span><text:span text:style-name="T28">　口訣大全（依主題分類）</text:span></text:h>
      <text:h text:style-name="P3" text:outline-level="3"><text:span text:style-name="T178">▍</text:span><text:span text:style-name="T179"> </text:span><text:span text:style-name="T180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91">TCP/IP </text:span><text:span text:style-name="T183">四層心法：</text:span><text:span text:style-name="T99">應用層→給人用（</text:span><text:span text:style-name="T148">HTTP/DNS/DHCP/SSH/MQTT</text:span><text:span text:style-name="T99">）｜傳輸層→怎麼送（</text:span><text:span text:style-name="T148">TCP </text:span><text:span text:style-name="T99">穩、</text:span><text:span text:style-name="T148">UDP </text:span><text:span text:style-name="T99">快）｜網路層→走哪條路（</text:span><text:span text:style-name="T148">IP/ICMP</text:span><text:span text:style-name="T99">）｜連結層→同一區網怎麼接（</text:span><text:span text:style-name="T148">Ethernet/ARP</text:span><text:span text:style-name="T99">）</text:span></text:p>
            <text:p text:style-name="P10"><text:span text:style-name="T191">OSI vs TCP/IP</text:span><text:span text:style-name="T183">：</text:span><text:span text:style-name="T148">OSI 7 </text:span><text:span text:style-name="T99">層（理論）、</text:span><text:span text:style-name="T148">TCP/IP 4 </text:span><text:span text:style-name="T99">層（實際）；差別在 </text:span><text:span text:style-name="T148">TCP/IP </text:span><text:span text:style-name="T99">把 </text:span><text:span text:style-name="T148">Session</text:span><text:span text:style-name="T99">＋</text:span><text:span text:style-name="T148">Presentation </text:span><text:span text:style-name="T99">併入 </text:span><text:span text:style-name="T148">Application</text:span><text:span text:style-name="T99">。</text:span></text:p>
            <text:p text:style-name="P10"><text:span text:style-name="T191">TCP vs UDP</text:span><text:span text:style-name="T183">：</text:span><text:span text:style-name="T148">TCP</text:span><text:span text:style-name="T99">「穩定優先」（保證送達、會重傳）；</text:span><text:span text:style-name="T148">UDP</text:span><text:span text:style-name="T99">「速度優先」（不保證、不重傳）。</text:span></text:p>
            <text:p text:style-name="P10"><text:span text:style-name="T183">三件事：</text:span><text:span text:style-name="T148">IP→</text:span><text:span text:style-name="T99">定位（目的地是誰）｜</text:span><text:span text:style-name="T148">Routing→</text:span><text:span text:style-name="T99">選路（怎麼走最快）｜</text:span><text:span text:style-name="T148">ICMP→</text:span><text:span text:style-name="T99">回報（出錯通知你）。</text:span></text:p>
            <text:p text:style-name="P10"><text:span text:style-name="T191">Traceroute</text:span><text:span text:style-name="T183">＝</text:span><text:span text:style-name="T148">TTL </text:span><text:span text:style-name="T99">遞增 ＋ </text:span><text:span text:style-name="T148">ICMP </text:span><text:span text:style-name="T99">回報，逐步「炸出」完整路徑。</text:span></text:p>
            <text:p text:style-name="P10"><text:span text:style-name="T191">ARP</text:span><text:span text:style-name="T183">＝</text:span><text:span text:style-name="T99">用 </text:span><text:span text:style-name="T148">IP </text:span><text:span text:style-name="T99">找 </text:span><text:span text:style-name="T148">MAC</text:span><text:span text:style-name="T99">，只在同一個 </text:span><text:span text:style-name="T148">LAN </text:span><text:span text:style-name="T99">內使用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二、</text:span><text:span text:style-name="T179">IP </text:span><text:span text:style-name="T180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91">VLSM </text:span><text:span text:style-name="T183">黃金公式：</text:span><text:span text:style-name="T99">需求 ＋</text:span><text:span text:style-name="T148">2 → </text:span><text:span text:style-name="T99">找最小 </text:span><text:span text:style-name="T148">2ⁿ → </text:span><text:span text:style-name="T99">前綴 </text:span><text:span text:style-name="T148">/(32−n)</text:span><text:span text:style-name="T99">。</text:span></text:p>
            <text:p text:style-name="P10"><text:span text:style-name="T183">可用主機數：</text:span><text:span text:style-name="T148">2^(</text:span><text:span text:style-name="T99">主機 </text:span><text:span text:style-name="T148">bit) − 2</text:span><text:span text:style-name="T99">（扣掉網路位址與廣播位址）。</text:span></text:p>
            <text:p text:style-name="P10"><text:span text:style-name="T191">CIDR </text:span><text:span text:style-name="T183">合併：</text:span><text:span text:style-name="T99">連續 ＋ 數量 </text:span><text:span text:style-name="T148">2ⁿ </text:span><text:span text:style-name="T99">＋ 起點對齊 → 合併 </text:span><text:span text:style-name="T148">2ⁿ </text:span><text:span text:style-name="T99">個子網則「前綴減 </text:span><text:span text:style-name="T148">n</text:span><text:span text:style-name="T99">」。</text:span></text:p>
            <text:p text:style-name="P10"><text:span text:style-name="T183">前綴速背：</text:span><text:span text:style-name="T148">/25=126</text:span><text:span text:style-name="T99">、</text:span><text:span text:style-name="T148">/26=62</text:span><text:span text:style-name="T99">、</text:span><text:span text:style-name="T148">/27=30</text:span><text:span text:style-name="T99">、</text:span><text:span text:style-name="T148">/28=14</text:span><text:span text:style-name="T99">、</text:span><text:span text:style-name="T148">/29=6</text:span><text:span text:style-name="T99">、</text:span><text:span text:style-name="T148">/30=2</text:span><text:span text:style-name="T99">。</text:span></text:p>
            <text:p text:style-name="P10"><text:span text:style-name="T183">封包切割：</text:span><text:span text:style-name="T99">封包 </text:span><text:span text:style-name="T148">&gt; MTU </text:span><text:span text:style-name="T99">就切（</text:span><text:span text:style-name="T148">Fragmentation</text:span><text:span text:style-name="T99">）；</text:span><text:span text:style-name="T148">Fragment Offset </text:span><text:span text:style-name="T99">＝ 起始位置 </text:span><text:span text:style-name="T148">÷ 8</text:span><text:span text:style-name="T99">。</text:span></text:p>
            <text:p text:style-name="P10"><text:span text:style-name="T183">誰能切：</text:span><text:span text:style-name="T148">IPv4</text:span><text:span text:style-name="T99">＝</text:span><text:span text:style-name="T148">Router </text:span><text:span text:style-name="T99">或 </text:span><text:span text:style-name="T148">Source </text:span><text:span text:style-name="T99">可切；</text:span><text:span text:style-name="T148">IPv6</text:span><text:span text:style-name="T99">＝只有 </text:span><text:span text:style-name="T148">Source </text:span><text:span text:style-name="T99">切，必搭 </text:span><text:span text:style-name="T148">PMTUD</text:span><text:span text:style-name="T99">。</text:span></text:p>
            <text:p text:style-name="P10"><text:span text:style-name="T191">Protocol </text:span><text:span text:style-name="T183">值：</text:span><text:span text:style-name="T148">ICMP=1</text:span><text:span text:style-name="T99">、</text:span><text:span text:style-name="T148">TCP=6</text:span><text:span text:style-name="T99">、</text:span><text:span text:style-name="T148">UDP=17</text:span><text:span text:style-name="T99">｜</text:span><text:span text:style-name="T148">DF=1 </text:span><text:span text:style-name="T99">禁止切、</text:span><text:span text:style-name="T148">MF=1 </text:span><text:span text:style-name="T99">後面還有分段｜</text:span><text:span text:style-name="T148">MSS</text:span><text:span text:style-name="T99">＝</text:span><text:span text:style-name="T148">MTU−20−20</text:span><text:span text:style-name="T99">＝</text:span><text:span text:style-name="T148">1460</text:span><text:span text:style-name="T99">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三、</text:span><text:span text:style-name="T179">IPv4 → IPv6</text:span><text:span text:style-name="T180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91">IPv6 </text:span><text:span text:style-name="T183">特點：</text:span><text:span text:style-name="T99">大（</text:span><text:span text:style-name="T148">128 bit</text:span><text:span text:style-name="T99">）＋ 安全（</text:span><text:span text:style-name="T148">IPsec</text:span><text:span text:style-name="T99">）＋ 快（固定 </text:span><text:span text:style-name="T148">Header</text:span><text:span text:style-name="T99">）＋ 自動（</text:span><text:span text:style-name="T148">SLAAC</text:span><text:span text:style-name="T99">）＋ 乾淨（無 </text:span><text:span text:style-name="T148">Broadcast</text:span><text:span text:style-name="T99">）。</text:span></text:p>
            <text:p text:style-name="P10"><text:span text:style-name="T183">三種過渡技術：</text:span><text:span text:style-name="T99">雙語（</text:span><text:span text:style-name="T148">Dual Stack</text:span><text:span text:style-name="T99">）＋ 偽裝（</text:span><text:span text:style-name="T148">Tunneling</text:span><text:span text:style-name="T99">）＋ 翻譯（</text:span><text:span text:style-name="T148">Translation</text:span><text:span text:style-name="T99">）。</text:span></text:p>
            <text:p text:style-name="P10"><text:span text:style-name="T183">生活比喻：</text:span><text:span text:style-name="T148">Dual Stack</text:span><text:span text:style-name="T99">＝同時會中英文；</text:span><text:span text:style-name="T148">Tunneling</text:span><text:span text:style-name="T99">＝英文信裝進中文信封偷渡；</text:span><text:span text:style-name="T148">Translation</text:span><text:span text:style-name="T99">＝現場請翻譯口譯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四、</text:span><text:span text:style-name="T179">ARP</text:span><text:span text:style-name="T180">、</text:span><text:span text:style-name="T179">NAT </text:span><text:span text:style-name="T180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上網流程：</text:span><text:span text:style-name="T148">DNS → ARP → L2 </text:span><text:span text:style-name="T99">封包 → </text:span><text:span text:style-name="T148">NAT</text:span><text:span text:style-name="T99">（去程）→ </text:span><text:span text:style-name="T148">Internet → NAT</text:span><text:span text:style-name="T99">（回程）→ 你。</text:span></text:p>
            <text:p text:style-name="P10"><text:span text:style-name="T183">核心觀念：</text:span><text:span text:style-name="T148">IP</text:span><text:span text:style-name="T99">＝最終目的地（全程不變）；</text:span><text:span text:style-name="T148">MAC</text:span><text:span text:style-name="T99">＝下一站（每跳更換）。</text:span></text:p>
            <text:p text:style-name="P10"><text:span text:style-name="T183">最大地雷：</text:span><text:span text:style-name="T148">ARP </text:span><text:span text:style-name="T99">找的是「路由器（預設閘道）」的 </text:span><text:span text:style-name="T148">MAC</text:span><text:span text:style-name="T99">，不是 </text:span><text:span text:style-name="T148">Google </text:span><text:span text:style-name="T99">的 </text:span><text:span text:style-name="T148">MAC</text:span><text:span text:style-name="T99">。</text:span></text:p>
            <text:p text:style-name="P10"><text:span text:style-name="T191">PAT</text:span><text:span text:style-name="T183">：</text:span><text:span text:style-name="T99">多台共用一個公網 </text:span><text:span text:style-name="T148">IP</text:span><text:span text:style-name="T99">，靠 </text:span><text:span text:style-name="T148">Port </text:span><text:span text:style-name="T99">號碼區分（最重要）。</text:span></text:p>
          </table:table-cell>
        </table:table-row>
      </table:table>
      <text:h text:style-name="P3" text:outline-level="3"><text:soft-page-break/><text:span text:style-name="T178">▍</text:span><text:span text:style-name="T179"> </text:span><text:span text:style-name="T180">五、</text:span><text:span text:style-name="T179">TCP </text:span><text:span text:style-name="T180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三次握手：</text:span><text:span text:style-name="T148">SYN → SYN</text:span><text:span text:style-name="T99">＋</text:span><text:span text:style-name="T148">ACK → ACK</text:span><text:span text:style-name="T99">，確認雙向都能通訊。</text:span></text:p>
            <text:p text:style-name="P10"><text:span text:style-name="T183">傳送量公式：</text:span><text:span text:style-name="T99">實際傳送量 ＝ </text:span><text:span text:style-name="T148">min(rwnd, cwnd)</text:span><text:span text:style-name="T99">。</text:span><text:span text:style-name="T148">rwnd</text:span><text:span text:style-name="T99">＝接收端限制、</text:span><text:span text:style-name="T148">cwnd</text:span><text:span text:style-name="T99">＝網路限制。</text:span></text:p>
            <text:p text:style-name="P10"><text:span text:style-name="T183">擁塞控制節奏：</text:span><text:span text:style-name="T148">Slow Start</text:span><text:span text:style-name="T99">（指數成長）→ </text:span><text:span text:style-name="T148">Congestion Avoidance</text:span><text:span text:style-name="T99">（線性成長）→ 丟包（減速）。</text:span></text:p>
            <text:p text:style-name="P10"><text:span text:style-name="T183">丟包處理：</text:span><text:span text:style-name="T148">Timeout → cwnd </text:span><text:span text:style-name="T99">重設為 </text:span><text:span text:style-name="T148">1 </text:span><text:span text:style-name="T99">回 </text:span><text:span text:style-name="T148">Slow Start</text:span><text:span text:style-name="T99">；</text:span><text:span text:style-name="T148">3 </text:span><text:span text:style-name="T99">個重複 </text:span><text:span text:style-name="T148">ACK → cwnd </text:span><text:span text:style-name="T99">減半續 </text:span><text:span text:style-name="T148">CA</text:span><text:span text:style-name="T99">。</text:span></text:p>
            <text:p text:style-name="P10"><text:span text:style-name="T191">AIMD</text:span><text:span text:style-name="T183">：</text:span><text:span text:style-name="T99">沒丟包 每 </text:span><text:span text:style-name="T148">RTT</text:span><text:span text:style-name="T99">＋</text:span><text:span text:style-name="T148">1</text:span><text:span text:style-name="T99">（加法增長）；丟包 </text:span><text:span text:style-name="T148">×0.5</text:span><text:span text:style-name="T99">（乘法減少）。</text:span></text:p>
            <text:p text:style-name="P10"><text:span text:style-name="T191">SYN Flood</text:span><text:span text:style-name="T183">：</text:span><text:span text:style-name="T99">大量半連線（</text:span><text:span text:style-name="T148">Half-open</text:span><text:span text:style-name="T99">）耗盡 </text:span><text:span text:style-name="T148">Server </text:span><text:span text:style-name="T99">資源 → </text:span><text:span text:style-name="T148">DoS</text:span><text:span text:style-name="T99">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六、</text:span><text:span text:style-name="T179">DNS </text:span><text:span text:style-name="T180">與 </text:span><text:span text:style-name="T179">DNSSEC</text:span><text:span text:style-name="T180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查詢流程：</text:span><text:span text:style-name="T148">Cache → Local → Root → TLD → Authoritative → </text:span><text:span text:style-name="T99">取得 </text:span><text:span text:style-name="T148">IP</text:span><text:span text:style-name="T99">。</text:span></text:p>
            <text:p text:style-name="P10"><text:span text:style-name="T191">Recursive</text:span><text:span text:style-name="T183">：</text:span><text:span text:style-name="T99">「代查到底」（</text:span><text:span text:style-name="T148">DNS </text:span><text:span text:style-name="T99">幫你問完，你只問一次）。</text:span></text:p>
            <text:p text:style-name="P10"><text:span text:style-name="T191">Iterative</text:span><text:span text:style-name="T183">：</text:span><text:span text:style-name="T99">「逐層詢問」（你自己一層一層問）。</text:span></text:p>
            <text:p text:style-name="P10"><text:span text:style-name="T191">DNSSEC</text:span><text:span text:style-name="T183">：</text:span><text:span text:style-name="T99">驗證真偽，不是加密、不防 </text:span><text:span text:style-name="T148">DDoS</text:span><text:span text:style-name="T99">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七、路由協定 </text:span><text:span text:style-name="T179">OSPF / BGP</text:span><text:span text:style-name="T180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範圍分類：</text:span><text:span text:style-name="T99">公司／校園內 → </text:span><text:span text:style-name="T148">IGP</text:span><text:span text:style-name="T99">（</text:span><text:span text:style-name="T148">OSPF</text:span><text:span text:style-name="T99">、</text:span><text:span text:style-name="T148">RIP</text:span><text:span text:style-name="T99">）；公司與公司間 → </text:span><text:span text:style-name="T148">EGP</text:span><text:span text:style-name="T99">（</text:span><text:span text:style-name="T148">BGP</text:span><text:span text:style-name="T99">）。</text:span></text:p>
            <text:p text:style-name="P10"><text:span text:style-name="T191">OSPF </text:span><text:span text:style-name="T183">規定：</text:span><text:span text:style-name="T99">所有 </text:span><text:span text:style-name="T148">Area </text:span><text:span text:style-name="T99">一定要連到 </text:span><text:span text:style-name="T148">Area 0</text:span><text:span text:style-name="T99">（骨幹）才能互通。</text:span></text:p>
            <text:p text:style-name="P10"><text:span text:style-name="T191">OSPF </text:span><text:span text:style-name="T183">四種 </text:span><text:span text:style-name="T191">Router</text:span><text:span text:style-name="T183">：</text:span><text:span text:style-name="T148">Internal</text:span><text:span text:style-name="T99">（不出 </text:span><text:span text:style-name="T148">Area</text:span><text:span text:style-name="T99">）／</text:span><text:span text:style-name="T148">Backbone</text:span><text:span text:style-name="T99">（在 </text:span><text:span text:style-name="T148">Area 0</text:span><text:span text:style-name="T99">）／</text:span><text:span text:style-name="T148">ABR</text:span><text:span text:style-name="T99">（跨 </text:span><text:span text:style-name="T148">Area </text:span><text:span text:style-name="T99">橋樑）／</text:span><text:span text:style-name="T148">ASBR</text:span><text:span text:style-name="T99">（跨 </text:span><text:span text:style-name="T148">AS </text:span><text:span text:style-name="T99">入口）。</text:span></text:p>
            <text:p text:style-name="P10"><text:span text:style-name="T191">BGP </text:span><text:span text:style-name="T183">選路順序：</text:span><text:span text:style-name="T148">Weight &gt; Local Pref &gt; </text:span><text:span text:style-name="T99">自己產生 </text:span><text:span text:style-name="T148">&gt; AS-PATH &gt; Origin &gt; MED &gt; eBGP &gt; IGP cost &gt; Router ID</text:span><text:span text:style-name="T99">。</text:span></text:p>
            <text:p text:style-name="P10"><text:span text:style-name="T191">BGP </text:span><text:span text:style-name="T183">本質：</text:span><text:span text:style-name="T99">政策導向（不是距離導向）；</text:span><text:span text:style-name="T148">Local Preference </text:span><text:span text:style-name="T99">才是最重要的「通用」屬性（</text:span><text:span text:style-name="T148">Weight </text:span><text:span text:style-name="T99">為 </text:span><text:span text:style-name="T148">Cisco </text:span><text:span text:style-name="T99">私有）。</text:span></text:p>
            <text:p text:style-name="P10"><text:span text:style-name="T183">三層分工：</text:span><text:span text:style-name="T99">防火牆→「能不能走」｜</text:span><text:span text:style-name="T148">NAT→</text:span><text:span text:style-name="T99">「你是誰」｜</text:span><text:span text:style-name="T148">BGP→</text:span><text:span text:style-name="T99">「怎麼走」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八、網路系統進階 </text:span><text:span text:style-name="T179">SDN / LB / CDN / 5G</text:span><text:span text:style-name="T180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91">SDN</text:span><text:span text:style-name="T183">：</text:span><text:span text:style-name="T99">「分平面、三層 </text:span><text:span text:style-name="T148">App-</text:span><text:span text:style-name="T99">控</text:span><text:span text:style-name="T148">-</text:span><text:span text:style-name="T99">基」＝控制／資料分離；</text:span><text:span text:style-name="T148">Application → Control → Infrastructure</text:span><text:span text:style-name="T99">。</text:span></text:p>
            <text:p text:style-name="P10"><text:span text:style-name="T191">Load Balancing</text:span><text:span text:style-name="T183">：</text:span><text:span text:style-name="T99">「</text:span><text:span text:style-name="T148">LB </text:span><text:span text:style-name="T99">輪、重、黏」＝</text:span><text:span text:style-name="T148">Round Robin</text:span><text:span text:style-name="T99">（輪流）／</text:span><text:span text:style-name="T148">Weighted RR</text:span><text:span text:style-name="T99">（加權）／</text:span><text:span text:style-name="T148">Stickiness</text:span><text:span text:style-name="T99">（同人同台）。</text:span></text:p>
            <text:p text:style-name="P10"><text:span text:style-name="T191">CDN</text:span><text:span text:style-name="T183">：</text:span><text:span text:style-name="T99">「網址轉轉轉（</text:span><text:span text:style-name="T148">CNAME</text:span><text:span text:style-name="T99">），資料找最近（</text:span><text:span text:style-name="T148">Edge</text:span><text:span text:style-name="T99">）」；</text:span><text:span text:style-name="T148">CNAME</text:span><text:span text:style-name="T99">＝網址→網址（非 </text:span><text:span text:style-name="T148">IP</text:span><text:span text:style-name="T99">）。</text:span></text:p>
            <text:p text:style-name="P10"><text:span text:style-name="T191">5G</text:span><text:span text:style-name="T183">：</text:span><text:span text:style-name="T99">「快、低、多、切」＝</text:span><text:span text:style-name="T148">eMBB</text:span><text:span text:style-name="T99">（高速）／</text:span><text:span text:style-name="T148">URLLC</text:span><text:span text:style-name="T99">（超低延遲）／</text:span><text:span text:style-name="T148">mMTC</text:span><text:span text:style-name="T99">（大量連線）／</text:span><text:span text:style-name="T148">Network Slicing</text:span><text:span text:style-name="T99">（切片）。</text:span></text:p>
            <text:p text:style-name="P10"><text:span text:style-name="T191">10 </text:span><text:span text:style-name="T183">秒總背：</text:span><text:span text:style-name="T148">SDN </text:span><text:span text:style-name="T99">分離三層、</text:span><text:span text:style-name="T148">LB </text:span><text:span text:style-name="T99">輪重黏、</text:span><text:span text:style-name="T148">CDN CNAME→</text:span><text:span text:style-name="T99">最近、</text:span><text:span text:style-name="T148">5G </text:span><text:span text:style-name="T99">快低多切、</text:span><text:span text:style-name="T148">WiFi </text:span><text:span text:style-name="T99">聽、</text:span><text:span text:style-name="T148">BT </text:span><text:span text:style-name="T99">跳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九、無線通訊 </text:span><text:span text:style-name="T179">WiFi vs Bluetooth</text:span><text:span text:style-name="T180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一句總綱：</text:span><text:span text:style-name="T99">「</text:span><text:span text:style-name="T148">WiFi </text:span><text:span text:style-name="T99">先聽再說（</text:span><text:span text:style-name="T148">CSMA/CA</text:span><text:span text:style-name="T99">），</text:span><text:span text:style-name="T148">Bluetooth </text:span><text:span text:style-name="T99">一直換頻道（</text:span><text:span text:style-name="T148">FHSS</text:span><text:span text:style-name="T99">）」。</text:span></text:p>
            <text:p text:style-name="P10"><text:span text:style-name="T183">本質對比：</text:span><text:span text:style-name="T148">WiFi</text:span><text:span text:style-name="T99">＝搶頻道（菜市場）；</text:span><text:span text:style-name="T148">BT</text:span><text:span text:style-name="T99">＝排班（會議室預約）；時槽＝時間格子；</text:span><text:span text:style-name="T148">SCO</text:span><text:span text:style-name="T99">＝語音；</text:span><text:span text:style-name="T148">L2CAP</text:span><text:span text:style-name="T99">＝三通道。</text:span></text:p>
            <text:p text:style-name="P10"><text:span text:style-name="T183">最大陷阱：</text:span><text:span text:style-name="T99">有線 </text:span><text:span text:style-name="T148">Ethernet</text:span><text:span text:style-name="T99">＝</text:span><text:span text:style-name="T148">CD</text:span><text:span text:style-name="T99">（</text:span><text:span text:style-name="T148">Detect </text:span><text:span text:style-name="T99">偵測）；無線 </text:span><text:span text:style-name="T148">WiFi</text:span><text:span text:style-name="T99">＝</text:span><text:span text:style-name="T148">CA</text:span><text:span text:style-name="T99">（</text:span><text:span text:style-name="T148">Avoid </text:span><text:span text:style-name="T99">避免）。</text:span></text:p>
            <text:p text:style-name="P10"><text:span text:style-name="T191">QoS</text:span><text:span text:style-name="T183">／語音：</text:span><text:span text:style-name="T148">WiFi QoS</text:span><text:span text:style-name="T99">＝</text:span><text:span text:style-name="T148">EDCA</text:span><text:span text:style-name="T99">（急診室分級）；藍牙即時語音＝</text:span><text:span text:style-name="T148">SCO</text:span><text:span text:style-name="T99">／</text:span><text:span text:style-name="T148">eSCO</text:span><text:span text:style-name="T99">；</text:span><text:span text:style-name="T148">L2CAP </text:span><text:span text:style-name="T99">位於 </text:span><text:span text:style-name="T148">Data </text:span><text:soft-page-break/><text:span text:style-name="T148">Link </text:span><text:span text:style-name="T99">層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 loext:marker-style-name="T179"><text:span text:style-name="T190">🔑 </text:span><text:span text:style-name="T180">口訣</text:span></text:p>
            <text:p text:style-name="P9"><text:span text:style-name="T183">設備萬用口訣：</text:span><text:span text:style-name="T148">FW </text:span><text:span text:style-name="T99">封外、</text:span><text:span text:style-name="T148">WAF </text:span><text:span text:style-name="T99">看內、</text:span><text:span text:style-name="T148">NGFW </text:span><text:span text:style-name="T99">最強、</text:span><text:span text:style-name="T148">DMZ </text:span><text:span text:style-name="T99">隔離、</text:span><text:span text:style-name="T148">IOC </text:span><text:span text:style-name="T99">壞人、</text:span><text:span text:style-name="T148">Proxy </text:span><text:span text:style-name="T99">幫客、</text:span><text:span text:style-name="T148">Reverse </text:span><text:span text:style-name="T99">幫服。</text:span></text:p>
            <text:p text:style-name="P10"><text:span text:style-name="T191">IOC </text:span><text:span text:style-name="T183">四線索：</text:span><text:span text:style-name="T99">網（</text:span><text:span text:style-name="T148">Domain</text:span><text:span text:style-name="T99">）→ 檔（</text:span><text:span text:style-name="T148">Hash</text:span><text:span text:style-name="T99">）→ 連（</text:span><text:span text:style-name="T148">IP</text:span><text:span text:style-name="T99">）→ 控（</text:span><text:span text:style-name="T148">C2</text:span><text:span text:style-name="T99">）。</text:span></text:p>
            <text:p text:style-name="P10"><text:span text:style-name="T183">封包闖關順序：</text:span><text:span text:style-name="T148">Client → Proxy → Internet → FW/NGFW → DMZ → WAF → Reverse Proxy → </text:span><text:span text:style-name="T99">內部 </text:span><text:span text:style-name="T148">Server</text:span><text:span text:style-name="T99">。</text:span></text:p>
            <text:p text:style-name="P10"><text:span text:style-name="T183">三防分工：</text:span><text:span text:style-name="T148">Firewall </text:span><text:span text:style-name="T99">擋入口、</text:span><text:span text:style-name="T148">IDS </text:span><text:span text:style-name="T99">只看、</text:span><text:span text:style-name="T148">IPS </text:span><text:span text:style-name="T99">看＋擋；</text:span><text:span text:style-name="T148">HIDS </text:span><text:span text:style-name="T99">看主機（</text:span><text:span text:style-name="T148">Log</text:span><text:span text:style-name="T99">）、</text:span><text:span text:style-name="T148">NIDS </text:span><text:span text:style-name="T99">看網路（封包）。</text:span></text:p>
            <text:p text:style-name="P10"><text:span text:style-name="T183">易混兩協定：</text:span><text:span text:style-name="T148">SNMP </text:span><text:span text:style-name="T99">管理設備（應用層／</text:span><text:span text:style-name="T148">UDP</text:span><text:span text:style-name="T99">）、</text:span><text:span text:style-name="T148">ICMP </text:span><text:span text:style-name="T99">診斷網路（網路層）。</text:span></text:p>
            <text:p text:style-name="P10"><text:span text:style-name="T191">SQL Injection</text:span><text:span text:style-name="T183">：</text:span><text:span text:style-name="T99">攻擊＝</text:span><text:span text:style-name="T148">' OR 1=1 --</text:span><text:span text:style-name="T99">；防禦核心＝</text:span><text:span text:style-name="T148">Prepared Statement</text:span><text:span text:style-name="T99">（預備語句）。</text:span></text:p>
            <text:p text:style-name="P10"><text:span text:style-name="T191">Zero-Day</text:span><text:span text:style-name="T183">：</text:span><text:span text:style-name="T99">最怕「沒有 </text:span><text:span text:style-name="T148">Signature</text:span><text:span text:style-name="T99">」；防禦＝</text:span><text:span text:style-name="T148">Patch </text:span><text:span text:style-name="T99">更新 ＋ </text:span><text:span text:style-name="T148">IDS/IPS </text:span><text:span text:style-name="T99">＋ 網路分段。</text:span></text:p>
            <text:p text:style-name="P10"><text:span text:style-name="T183">企業資安三階段：</text:span><text:span text:style-name="T99">事前預防 → 事中偵測 → 事後復原。</text:span><text:span text:style-name="T148">RTO</text:span><text:span text:style-name="T99">＝停機時間、</text:span><text:span text:style-name="T148">RPO</text:span><text:span text:style-name="T99">＝資料損失量。</text:span></text:p>
            <text:p text:style-name="P10"><text:span text:style-name="T191">EDR/MDR</text:span><text:span text:style-name="T183">：</text:span><text:span text:style-name="T148">EDR</text:span><text:span text:style-name="T99">＝自己買工具守、</text:span><text:span text:style-name="T148">MDR</text:span><text:span text:style-name="T99">＝請公司幫你守、</text:span><text:span text:style-name="T148">ATT&amp;CK</text:span><text:span text:style-name="T99">＝駭客招式教材、數位韌性＝撐住快速復原。</text:span></text:p>
            <text:p text:style-name="P10"><text:span text:style-name="T191">SSDLC</text:span><text:span text:style-name="T183">：</text:span><text:span text:style-name="T148">Define→Design→Develop→Test→Deploy→Maintain</text:span><text:span text:style-name="T99">，精神是「左移（</text:span><text:span text:style-name="T148">Shift Left</text:span><text:span text:style-name="T99">）」。</text:span></text:p>
            <text:p text:style-name="P10"><text:span text:style-name="T191">Zero Trust</text:span><text:span text:style-name="T183">：</text:span><text:span text:style-name="T99">永不信任，始終驗證；查「人（</text:span><text:span text:style-name="T148">Identity</text:span><text:span text:style-name="T99">）機（</text:span><text:span text:style-name="T148">Device</text:span><text:span text:style-name="T99">）境（</text:span><text:span text:style-name="T148">Context</text:span><text:span text:style-name="T99">）」；配 </text:span><text:span text:style-name="T148">MFA</text:span><text:span text:style-name="T99">＋最小權限＋微分段＋持續監控。</text:span></text:p>
          </table:table-cell>
        </table:table-row>
      </table:table>
      <text:h text:style-name="P2" text:outline-level="2" loext:marker-style-name="T27"><text:span text:style-name="T27">Part B</text:span><text:span text:style-name="T28">　必背表格精選（考前掃一遍）</text:span></text:h>
      <text:h text:style-name="P3" text:outline-level="3"><text:span text:style-name="T178">▍</text:span><text:span text:style-name="T179"> ① </text:span><text:span text:style-name="T180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2" loext:marker-style-name="T65"><text:span text:style-name="T64">前綴</text:span><text:span text:style-name="T65"/></text:p>
            </table:table-cell>
            <table:table-cell table:style-name="表格14.A1" office:value-type="string">
              <text:p text:style-name="P22" loext:marker-style-name="T65"><text:span text:style-name="T64">主機 </text:span><text:span text:style-name="T74">bit</text:span></text:p>
            </table:table-cell>
            <table:table-cell table:style-name="表格14.A1" office:value-type="string">
              <text:p text:style-name="P22" loext:marker-style-name="T65"><text:span text:style-name="T74">IP </text:span><text:span text:style-name="T64">總數</text:span></text:p>
            </table:table-cell>
            <table:table-cell table:style-name="表格14.A1" office:value-type="string">
              <text:p text:style-name="P22" loext:marker-style-name="T65"><text:span text:style-name="T64">可用主機</text:span><text:span text:style-name="T65"/></text:p>
            </table:table-cell>
            <table:table-cell table:style-name="表格14.A1" office:value-type="string">
              <text:p text:style-name="P22" loext:marker-style-name="T65"><text:span text:style-name="T64">區塊步長</text:span><text:span text:style-name="T65"/></text:p>
            </table:table-cell>
            <table:table-cell table:style-name="表格14.A1" office:value-type="string">
              <text:p text:style-name="P22" loext:marker-style-name="T65"><text:span text:style-name="T64">廣播尾數範例</text:span><text:span text:style-name="T65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5" loext:marker-style-name="T78"><text:span text:style-name="T138">/24</text:span><text:span text:style-name="T78"/></text:p>
          </table:table-cell>
          <table:table-cell table:style-name="表格14.A2" office:value-type="string">
            <text:p text:style-name="P24" loext:marker-style-name="T78"><text:span text:style-name="T138">8</text:span><text:span text:style-name="T78"/></text:p>
          </table:table-cell>
          <table:table-cell table:style-name="表格14.A2" office:value-type="string">
            <text:p text:style-name="P25" loext:marker-style-name="T78"><text:span text:style-name="T138">256</text:span><text:span text:style-name="T78"/></text:p>
          </table:table-cell>
          <table:table-cell table:style-name="表格14.A2" office:value-type="string">
            <text:p text:style-name="P24" loext:marker-style-name="T31"><text:span text:style-name="T39">254</text:span><text:span text:style-name="T31"/></text:p>
          </table:table-cell>
          <table:table-cell table:style-name="表格14.A2" office:value-type="string">
            <text:p text:style-name="P25" loext:marker-style-name="T78"><text:span text:style-name="T138">+256</text:span><text:span text:style-name="T78"/></text:p>
          </table:table-cell>
          <table:table-cell table:style-name="表格14.A2" office:value-type="string">
            <text:p text:style-name="P25" loext:marker-style-name="T78"><text:span text:style-name="T138">255</text:span><text:span text:style-name="T78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78"><text:span text:style-name="T138">/25</text:span><text:span text:style-name="T78"/></text:p>
          </table:table-cell>
          <table:table-cell table:style-name="表格14.A3" office:value-type="string">
            <text:p text:style-name="P24" loext:marker-style-name="T78"><text:span text:style-name="T138">7</text:span><text:span text:style-name="T78"/></text:p>
          </table:table-cell>
          <table:table-cell table:style-name="表格14.A3" office:value-type="string">
            <text:p text:style-name="P25" loext:marker-style-name="T78"><text:span text:style-name="T138">128</text:span><text:span text:style-name="T78"/></text:p>
          </table:table-cell>
          <table:table-cell table:style-name="表格14.A3" office:value-type="string">
            <text:p text:style-name="P24" loext:marker-style-name="T31"><text:span text:style-name="T39">126</text:span><text:span text:style-name="T31"/></text:p>
          </table:table-cell>
          <table:table-cell table:style-name="表格14.A3" office:value-type="string">
            <text:p text:style-name="P25" loext:marker-style-name="T78"><text:span text:style-name="T138">+128</text:span><text:span text:style-name="T78"/></text:p>
          </table:table-cell>
          <table:table-cell table:style-name="表格14.A3" office:value-type="string">
            <text:p text:style-name="P25" loext:marker-style-name="T78"><text:span text:style-name="T138">127, 255</text:span><text:span text:style-name="T78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78"><text:span text:style-name="T138">/26</text:span><text:span text:style-name="T78"/></text:p>
          </table:table-cell>
          <table:table-cell table:style-name="表格14.A2" office:value-type="string">
            <text:p text:style-name="P24" loext:marker-style-name="T78"><text:span text:style-name="T138">6</text:span><text:span text:style-name="T78"/></text:p>
          </table:table-cell>
          <table:table-cell table:style-name="表格14.A2" office:value-type="string">
            <text:p text:style-name="P25" loext:marker-style-name="T78"><text:span text:style-name="T138">64</text:span><text:span text:style-name="T78"/></text:p>
          </table:table-cell>
          <table:table-cell table:style-name="表格14.A2" office:value-type="string">
            <text:p text:style-name="P24" loext:marker-style-name="T31"><text:span text:style-name="T39">62</text:span><text:span text:style-name="T31"/></text:p>
          </table:table-cell>
          <table:table-cell table:style-name="表格14.A2" office:value-type="string">
            <text:p text:style-name="P25" loext:marker-style-name="T78"><text:span text:style-name="T138">+64</text:span><text:span text:style-name="T78"/></text:p>
          </table:table-cell>
          <table:table-cell table:style-name="表格14.A2" office:value-type="string">
            <text:p text:style-name="P25" loext:marker-style-name="T78"><text:span text:style-name="T138">63, 127, 191, 255</text:span><text:span text:style-name="T78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78"><text:span text:style-name="T138">/27</text:span><text:span text:style-name="T78"/></text:p>
          </table:table-cell>
          <table:table-cell table:style-name="表格14.A3" office:value-type="string">
            <text:p text:style-name="P24" loext:marker-style-name="T78"><text:span text:style-name="T138">5</text:span><text:span text:style-name="T78"/></text:p>
          </table:table-cell>
          <table:table-cell table:style-name="表格14.A3" office:value-type="string">
            <text:p text:style-name="P25" loext:marker-style-name="T78"><text:span text:style-name="T138">32</text:span><text:span text:style-name="T78"/></text:p>
          </table:table-cell>
          <table:table-cell table:style-name="表格14.A3" office:value-type="string">
            <text:p text:style-name="P24" loext:marker-style-name="T31"><text:span text:style-name="T39">30</text:span><text:span text:style-name="T31"/></text:p>
          </table:table-cell>
          <table:table-cell table:style-name="表格14.A3" office:value-type="string">
            <text:p text:style-name="P25" loext:marker-style-name="T78"><text:span text:style-name="T138">+32</text:span><text:span text:style-name="T78"/></text:p>
          </table:table-cell>
          <table:table-cell table:style-name="表格14.A3" office:value-type="string">
            <text:p text:style-name="P25" loext:marker-style-name="T78"><text:span text:style-name="T138">31, 63, 95 …</text:span><text:span text:style-name="T78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78"><text:span text:style-name="T138">/28</text:span><text:span text:style-name="T78"/></text:p>
          </table:table-cell>
          <table:table-cell table:style-name="表格14.A2" office:value-type="string">
            <text:p text:style-name="P24" loext:marker-style-name="T78"><text:span text:style-name="T138">4</text:span><text:span text:style-name="T78"/></text:p>
          </table:table-cell>
          <table:table-cell table:style-name="表格14.A2" office:value-type="string">
            <text:p text:style-name="P25" loext:marker-style-name="T78"><text:span text:style-name="T138">16</text:span><text:span text:style-name="T78"/></text:p>
          </table:table-cell>
          <table:table-cell table:style-name="表格14.A2" office:value-type="string">
            <text:p text:style-name="P24" loext:marker-style-name="T31"><text:span text:style-name="T39">14</text:span><text:span text:style-name="T31"/></text:p>
          </table:table-cell>
          <table:table-cell table:style-name="表格14.A2" office:value-type="string">
            <text:p text:style-name="P25" loext:marker-style-name="T78"><text:span text:style-name="T138">+16</text:span><text:span text:style-name="T78"/></text:p>
          </table:table-cell>
          <table:table-cell table:style-name="表格14.A2" office:value-type="string">
            <text:p text:style-name="P25" loext:marker-style-name="T78"><text:span text:style-name="T138">15, 31, 47 …</text:span><text:span text:style-name="T78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78"><text:span text:style-name="T138">/29</text:span><text:span text:style-name="T78"/></text:p>
          </table:table-cell>
          <table:table-cell table:style-name="表格14.A3" office:value-type="string">
            <text:p text:style-name="P24" loext:marker-style-name="T78"><text:span text:style-name="T138">3</text:span><text:span text:style-name="T78"/></text:p>
          </table:table-cell>
          <table:table-cell table:style-name="表格14.A3" office:value-type="string">
            <text:p text:style-name="P25" loext:marker-style-name="T78"><text:span text:style-name="T138">8</text:span><text:span text:style-name="T78"/></text:p>
          </table:table-cell>
          <table:table-cell table:style-name="表格14.A3" office:value-type="string">
            <text:p text:style-name="P24" loext:marker-style-name="T31"><text:span text:style-name="T39">6</text:span><text:span text:style-name="T31"/></text:p>
          </table:table-cell>
          <table:table-cell table:style-name="表格14.A3" office:value-type="string">
            <text:p text:style-name="P25" loext:marker-style-name="T78"><text:span text:style-name="T138">+8</text:span><text:span text:style-name="T78"/></text:p>
          </table:table-cell>
          <table:table-cell table:style-name="表格14.A3" office:value-type="string">
            <text:p text:style-name="P25" loext:marker-style-name="T78"><text:span text:style-name="T138">7, 15, 23 …</text:span><text:span text:style-name="T78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78"><text:span text:style-name="T138">/30</text:span><text:span text:style-name="T78"/></text:p>
          </table:table-cell>
          <table:table-cell table:style-name="表格14.A2" office:value-type="string">
            <text:p text:style-name="P24" loext:marker-style-name="T78"><text:span text:style-name="T138">2</text:span><text:span text:style-name="T78"/></text:p>
          </table:table-cell>
          <table:table-cell table:style-name="表格14.A2" office:value-type="string">
            <text:p text:style-name="P25" loext:marker-style-name="T78"><text:span text:style-name="T138">4</text:span><text:span text:style-name="T78"/></text:p>
          </table:table-cell>
          <table:table-cell table:style-name="表格14.A2" office:value-type="string">
            <text:p text:style-name="P24" loext:marker-style-name="T31"><text:span text:style-name="T39">2</text:span><text:span text:style-name="T31"/></text:p>
          </table:table-cell>
          <table:table-cell table:style-name="表格14.A2" office:value-type="string">
            <text:p text:style-name="P25" loext:marker-style-name="T78"><text:span text:style-name="T138">+4</text:span><text:span text:style-name="T78"/></text:p>
          </table:table-cell>
          <table:table-cell table:style-name="表格14.A2" office:value-type="string">
            <text:p text:style-name="P25" loext:marker-style-name="T78"><text:span text:style-name="T138">3, 7, 11 …</text:span><text:span text:style-name="T78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9"><text:span text:style-name="T194">例外 </text:span><text:span text:style-name="T199">/31</text:span><text:span text:style-name="T194">：</text:span><text:span text:style-name="T99">點對點連線（</text:span><text:span text:style-name="T148">RFC 3021</text:span><text:span text:style-name="T99">），</text:span><text:span text:style-name="T148">2 </text:span><text:span text:style-name="T99">個 </text:span><text:span text:style-name="T148">IP </text:span><text:span text:style-name="T99">全部可用，無網路位址與廣播位址。</text:span><text:span text:style-name="T148">/32 </text:span><text:span text:style-name="T99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② TCP vs UDP</text:span><text:span text:style-name="T180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6" loext:marker-style-name="T69"><text:span text:style-name="T68">比較項目</text:span><text:span text:style-name="T69"/></text:p>
            </table:table-cell>
            <table:table-cell table:style-name="表格15.A1" office:value-type="string">
              <text:p text:style-name="P6" loext:marker-style-name="T69"><text:span text:style-name="T75">TCP</text:span><text:span text:style-name="T68">（穩定）</text:span></text:p>
            </table:table-cell>
            <table:table-cell table:style-name="表格15.A1" office:value-type="string">
              <text:p text:style-name="P6" loext:marker-style-name="T69"><text:span text:style-name="T75">UDP</text:span><text:span text:style-name="T68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5" loext:marker-style-name="T125"><text:span text:style-name="T124">連線方式</text:span><text:span text:style-name="T125"/></text:p>
          </table:table-cell>
          <table:table-cell table:style-name="表格15.A2" office:value-type="string">
            <text:p text:style-name="P25" loext:marker-style-name="T125"><text:span text:style-name="T124">三次握手才開始</text:span><text:span text:style-name="T125"/></text:p>
          </table:table-cell>
          <table:table-cell table:style-name="表格15.A2" office:value-type="string">
            <text:p text:style-name="P25" loext:marker-style-name="T125"><text:span text:style-name="T124">無連線，直接送</text:span><text:span text:style-name="T125"/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25"><text:span text:style-name="T124">可靠性</text:span><text:span text:style-name="T125"/></text:p>
          </table:table-cell>
          <table:table-cell table:style-name="表格15.A3" office:value-type="string">
            <text:p text:style-name="P25" loext:marker-style-name="T125"><text:span text:style-name="T124">保證送達、會重傳</text:span><text:span text:style-name="T125"/></text:p>
          </table:table-cell>
          <table:table-cell table:style-name="表格15.A3" office:value-type="string">
            <text:p text:style-name="P25" loext:marker-style-name="T125"><text:span text:style-name="T124">不保證、不重傳</text:span><text:span text:style-name="T125"/></text:p>
          </table:table-cell>
        </table:table-row>
        <table:table-row table:style-name="表格15.1">
          <table:table-cell table:style-name="表格15.A2" office:value-type="string">
            <text:p text:style-name="P25" loext:marker-style-name="T125"><text:span text:style-name="T124">順序</text:span><text:span text:style-name="T125"/></text:p>
          </table:table-cell>
          <table:table-cell table:style-name="表格15.A2" office:value-type="string">
            <text:p text:style-name="P25" loext:marker-style-name="T125"><text:span text:style-name="T124">保證順序</text:span><text:span text:style-name="T125"/></text:p>
          </table:table-cell>
          <table:table-cell table:style-name="表格15.A2" office:value-type="string">
            <text:p text:style-name="P25" loext:marker-style-name="T125"><text:span text:style-name="T124">不保證順序</text:span><text:span text:style-name="T125"/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25"><text:span text:style-name="T124">速度</text:span><text:span text:style-name="T125"/></text:p>
          </table:table-cell>
          <table:table-cell table:style-name="表格15.A3" office:value-type="string">
            <text:p text:style-name="P25" loext:marker-style-name="T125"><text:span text:style-name="T124">較慢（有控制機制）</text:span><text:span text:style-name="T125"/></text:p>
          </table:table-cell>
          <table:table-cell table:style-name="表格15.A3" office:value-type="string">
            <text:p text:style-name="P25" loext:marker-style-name="T125"><text:span text:style-name="T124">較快（無額外開銷）</text:span><text:span text:style-name="T125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5" loext:marker-style-name="T125"><text:span text:style-name="T124">適用</text:span><text:span text:style-name="T125"/></text:p>
          </table:table-cell>
          <table:table-cell table:style-name="表格15.A2" office:value-type="string">
            <text:p text:style-name="P25" loext:marker-style-name="T125"><text:span text:style-name="T124">網頁、</text:span><text:span text:style-name="T167">Email</text:span><text:span text:style-name="T124">、</text:span><text:span text:style-name="T167">FTP</text:span><text:span text:style-name="T124">、檔案</text:span></text:p>
          </table:table-cell>
          <table:table-cell table:style-name="表格15.A2" office:value-type="string">
            <text:p text:style-name="P25" loext:marker-style-name="T125"><text:span text:style-name="T124">串流、遊戲、</text:span><text:span text:style-name="T167">VoIP</text:span><text:span text:style-name="T124">、</text:span><text:span text:style-name="T167">DNS</text:span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25"><text:span text:style-name="T124">一句話</text:span><text:span text:style-name="T125"/></text:p>
          </table:table-cell>
          <table:table-cell table:style-name="表格15.A3" office:value-type="string">
            <text:p text:style-name="P25" loext:marker-style-name="T187"><text:span text:style-name="T186">「穩定優先」</text:span><text:span text:style-name="T187"/></text:p>
          </table:table-cell>
          <table:table-cell table:style-name="表格15.A3" office:value-type="string">
            <text:p text:style-name="P25" loext:marker-style-name="T34"><text:span text:style-name="T33">「速度優先」</text:span><text:span text:style-name="T34"/></text:p>
          </table:table-cell>
        </table:table-row>
      </table:table>
      <text:h text:style-name="P3" text:outline-level="3"><text:span text:style-name="T178">▍</text:span><text:span text:style-name="T179"> ③ IPv4 vs IPv6 </text:span><text:span text:style-name="T180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6" loext:marker-style-name="T65"><text:span text:style-name="T64">比較項目</text:span><text:span text:style-name="T65"/></text:p>
            </table:table-cell>
            <table:table-cell table:style-name="表格16.A1" office:value-type="string">
              <text:p text:style-name="P6" loext:marker-style-name="T65"><text:span text:style-name="T74">✗ IPv4 </text:span><text:span text:style-name="T64">問題</text:span></text:p>
            </table:table-cell>
            <table:table-cell table:style-name="表格16.A1" office:value-type="string">
              <text:p text:style-name="P6" loext:marker-style-name="T65"><text:span text:style-name="T74">✓ IPv6 </text:span><text:span text:style-name="T64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5" loext:marker-style-name="T78"><text:span text:style-name="T77">位址長度</text:span><text:span text:style-name="T78"/></text:p>
          </table:table-cell>
          <table:table-cell table:style-name="表格16.A2" office:value-type="string">
            <text:p text:style-name="P25" loext:marker-style-name="T78"><text:span text:style-name="T138">32 bit</text:span><text:span text:style-name="T77">，約 </text:span><text:span text:style-name="T138">43 </text:span><text:span text:style-name="T77">億個，已不足</text:span></text:p>
          </table:table-cell>
          <table:table-cell table:style-name="表格16.A2" office:value-type="string">
            <text:p text:style-name="P25" loext:marker-style-name="T78"><text:span text:style-name="T138">128 bit</text:span><text:span text:style-name="T77">，約 </text:span><text:span text:style-name="T138">3.4×10³⁸</text:span><text:span text:style-name="T77">，近乎無限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78"><text:span text:style-name="T138">NAT</text:span><text:span text:style-name="T78"/></text:p>
          </table:table-cell>
          <table:table-cell table:style-name="表格16.A3" office:value-type="string">
            <text:p text:style-name="P25" loext:marker-style-name="T78"><text:span text:style-name="T77">需 </text:span><text:span text:style-name="T138">NAT </text:span><text:span text:style-name="T77">共用 </text:span><text:span text:style-name="T138">IP</text:span><text:span text:style-name="T77">，破壞 </text:span><text:span text:style-name="T138">E2E</text:span></text:p>
          </table:table-cell>
          <table:table-cell table:style-name="表格16.A3" office:value-type="string">
            <text:p text:style-name="P25" loext:marker-style-name="T78"><text:span text:style-name="T77">每裝置獨立公開 </text:span><text:span text:style-name="T138">IP</text:span><text:span text:style-name="T77">，恢復 </text:span><text:span text:style-name="T138">E2E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78"><text:span text:style-name="T77">安全性</text:span><text:span text:style-name="T78"/></text:p>
          </table:table-cell>
          <table:table-cell table:style-name="表格16.A2" office:value-type="string">
            <text:p text:style-name="P25" loext:marker-style-name="T78"><text:span text:style-name="T77">無內建加密／驗證</text:span><text:span text:style-name="T78"/></text:p>
          </table:table-cell>
          <table:table-cell table:style-name="表格16.A2" office:value-type="string">
            <text:p text:style-name="P25" loext:marker-style-name="T78"><text:span text:style-name="T77">支援 </text:span><text:span text:style-name="T138">IPsec</text:span><text:span text:style-name="T77">（</text:span><text:span text:style-name="T138">RFC 6434 </text:span><text:span text:style-name="T77">後改建議）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78"><text:span text:style-name="T138">Header</text:span><text:span text:style-name="T78"/></text:p>
          </table:table-cell>
          <table:table-cell table:style-name="表格16.A3" office:value-type="string">
            <text:p text:style-name="P25" loext:marker-style-name="T78"><text:span text:style-name="T77">可變長度含 </text:span><text:span text:style-name="T138">Options</text:span><text:span text:style-name="T77">，效率低</text:span></text:p>
          </table:table-cell>
          <table:table-cell table:style-name="表格16.A3" office:value-type="string">
            <text:p text:style-name="P25" loext:marker-style-name="T78"><text:span text:style-name="T77">固定 </text:span><text:span text:style-name="T138">40 bytes</text:span><text:span text:style-name="T77">，轉送更快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78"><text:span text:style-name="T138">QoS</text:span><text:span text:style-name="T78"/></text:p>
          </table:table-cell>
          <table:table-cell table:style-name="表格16.A2" office:value-type="string">
            <text:p text:style-name="P25" loext:marker-style-name="T78"><text:span text:style-name="T77">無法標記優先權</text:span><text:span text:style-name="T78"/></text:p>
          </table:table-cell>
          <table:table-cell table:style-name="表格16.A2" office:value-type="string">
            <text:p text:style-name="P25" loext:marker-style-name="T78"><text:span text:style-name="T138">Flow Label </text:span><text:span text:style-name="T77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78"><text:span text:style-name="T77">廣播</text:span><text:span text:style-name="T78"/></text:p>
          </table:table-cell>
          <table:table-cell table:style-name="表格16.A3" office:value-type="string">
            <text:p text:style-name="P25" loext:marker-style-name="T78"><text:span text:style-name="T138">Broadcast </text:span><text:span text:style-name="T77">發給所有人</text:span></text:p>
          </table:table-cell>
          <table:table-cell table:style-name="表格16.A3" office:value-type="string">
            <text:p text:style-name="P25" loext:marker-style-name="T78"><text:span text:style-name="T77">改用 </text:span><text:span text:style-name="T138">Multicast</text:span><text:span text:style-name="T77">／</text:span><text:span text:style-name="T138">Anycast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78"><text:span text:style-name="T138">IP </text:span><text:span text:style-name="T77">配置</text:span></text:p>
          </table:table-cell>
          <table:table-cell table:style-name="表格16.A2" office:value-type="string">
            <text:p text:style-name="P25" loext:marker-style-name="T78"><text:span text:style-name="T77">手動或 </text:span><text:span text:style-name="T138">DHCP</text:span><text:span text:style-name="T77">，繁瑣</text:span></text:p>
          </table:table-cell>
          <table:table-cell table:style-name="表格16.A2" office:value-type="string">
            <text:p text:style-name="P25" loext:marker-style-name="T78"><text:span text:style-name="T138">SLAAC </text:span><text:span text:style-name="T77">無狀態自動配置</text:span></text:p>
          </table:table-cell>
        </table:table-row>
      </table:table>
      <text:h text:style-name="P3" text:outline-level="3"><text:span text:style-name="T178">▍</text:span><text:span text:style-name="T179"> ④ TCP </text:span><text:span text:style-name="T180">丟包處理（第五篇 </text:span><text:span text:style-name="T179">· </text:span><text:span text:style-name="T180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6" loext:marker-style-name="T65"><text:span text:style-name="T64">丟包偵測</text:span><text:span text:style-name="T65"/></text:p>
            </table:table-cell>
            <table:table-cell table:style-name="表格17.A1" office:value-type="string">
              <text:p text:style-name="P6" loext:marker-style-name="T65"><text:span text:style-name="T64">代表意義</text:span><text:span text:style-name="T65"/></text:p>
            </table:table-cell>
            <table:table-cell table:style-name="表格17.A1" office:value-type="string">
              <text:p text:style-name="P6" loext:marker-style-name="T65"><text:span text:style-name="T74">ssthresh</text:span><text:span text:style-name="T65"/></text:p>
            </table:table-cell>
            <table:table-cell table:style-name="表格17.A1" office:value-type="string">
              <text:p text:style-name="P6" loext:marker-style-name="T65"><text:span text:style-name="T74">cwnd</text:span><text:span text:style-name="T65"/></text:p>
            </table:table-cell>
            <table:table-cell table:style-name="表格17.A1" office:value-type="string">
              <text:p text:style-name="P6" loext:marker-style-name="T65"><text:span text:style-name="T64">下一階段</text:span><text:span text:style-name="T65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 loext:marker-style-name="T78"><text:span text:style-name="T138">Timeout</text:span><text:span text:style-name="T77">（逾時）</text:span></text:p>
          </table:table-cell>
          <table:table-cell table:style-name="表格17.A2" office:value-type="string">
            <text:p text:style-name="P25" loext:marker-style-name="T78"><text:span text:style-name="T77">網路嚴重擁塞</text:span><text:span text:style-name="T78"/></text:p>
          </table:table-cell>
          <table:table-cell table:style-name="表格17.A2" office:value-type="string">
            <text:p text:style-name="P25" loext:marker-style-name="T78"><text:span text:style-name="T138">= cwnd / 2</text:span><text:span text:style-name="T78"/></text:p>
          </table:table-cell>
          <table:table-cell table:style-name="表格17.A2" office:value-type="string">
            <text:p text:style-name="P25" loext:marker-style-name="T204"><text:span text:style-name="T203">重設為 </text:span><text:span text:style-name="T210">1</text:span></text:p>
          </table:table-cell>
          <table:table-cell table:style-name="表格17.A2" office:value-type="string">
            <text:p text:style-name="P25" loext:marker-style-name="T78"><text:span text:style-name="T77">重回 </text:span><text:span text:style-name="T138">Slow Start</text:span></text:p>
          </table:table-cell>
        </table:table-row>
        <table:table-row table:style-name="表格17.1">
          <table:table-cell table:style-name="表格17.A3" office:value-type="string">
            <text:p text:style-name="P25" loext:marker-style-name="T78"><text:span text:style-name="T138">3 </text:span><text:span text:style-name="T77">個重複 </text:span><text:span text:style-name="T138">ACK</text:span></text:p>
          </table:table-cell>
          <table:table-cell table:style-name="表格17.A3" office:value-type="string">
            <text:p text:style-name="P25" loext:marker-style-name="T78"><text:span text:style-name="T77">單一封包遺失</text:span><text:span text:style-name="T78"/></text:p>
          </table:table-cell>
          <table:table-cell table:style-name="表格17.A3" office:value-type="string">
            <text:p text:style-name="P25" loext:marker-style-name="T78"><text:span text:style-name="T138">= cwnd / 2</text:span><text:span text:style-name="T78"/></text:p>
          </table:table-cell>
          <table:table-cell table:style-name="表格17.A3" office:value-type="string">
            <text:p text:style-name="P25" loext:marker-style-name="T31"><text:span text:style-name="T39">= ssthresh</text:span><text:span text:style-name="T32">（減半）</text:span></text:p>
          </table:table-cell>
          <table:table-cell table:style-name="表格17.A3" office:value-type="string">
            <text:p text:style-name="P25" loext:marker-style-name="T78"><text:span text:style-name="T77">續 </text:span><text:span text:style-name="T138">Congestion Avoidance</text:span></text:p>
          </table:table-cell>
        </table:table-row>
      </table:table>
      <text:h text:style-name="P3" text:outline-level="3"><text:span text:style-name="T178">▍</text:span><text:span text:style-name="T179"> ⑤ BGP </text:span><text:span text:style-name="T180">選路九步（前面贏就停 </text:span><text:span text:style-name="T179">· </text:span><text:span text:style-name="T180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2" loext:marker-style-name="T65"><text:span text:style-name="T64">順序</text:span><text:span text:style-name="T65"/></text:p>
            </table:table-cell>
            <table:table-cell table:style-name="表格18.A1" office:value-type="string">
              <text:p text:style-name="P22" loext:marker-style-name="T65"><text:span text:style-name="T64">屬性</text:span><text:span text:style-name="T65"/></text:p>
            </table:table-cell>
            <table:table-cell table:style-name="表格18.A1" office:value-type="string">
              <text:p text:style-name="P22" loext:marker-style-name="T65"><text:span text:style-name="T64">規則／備註</text:span><text:span text:style-name="T65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 loext:marker-style-name="T78"><text:span text:style-name="T138">①</text:span><text:span text:style-name="T78"/></text:p>
          </table:table-cell>
          <table:table-cell table:style-name="表格18.A2" office:value-type="string">
            <text:p text:style-name="P25" loext:marker-style-name="T78"><text:span text:style-name="T138">Weight</text:span><text:span text:style-name="T78"/></text:p>
          </table:table-cell>
          <table:table-cell table:style-name="表格18.A2" office:value-type="string">
            <text:p text:style-name="P25" loext:marker-style-name="T78"><text:span text:style-name="T77">數值越高越優先 ⚠️ </text:span><text:span text:style-name="T138">Cisco </text:span><text:span text:style-name="T77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78"><text:span text:style-name="T138">②</text:span><text:span text:style-name="T78"/></text:p>
          </table:table-cell>
          <table:table-cell table:style-name="表格18.A3" office:value-type="string">
            <text:p text:style-name="P25" loext:marker-style-name="T31"><text:span text:style-name="T39">Local Preference</text:span><text:span text:style-name="T31"/></text:p>
          </table:table-cell>
          <table:table-cell table:style-name="表格18.A3" office:value-type="string">
            <text:p text:style-name="P25" loext:marker-style-name="T31"><text:span text:style-name="T32">數值越高越優先 ✅ 最重要的「通用」屬性</text:span><text:span text:style-name="T31"/></text:p>
          </table:table-cell>
        </table:table-row>
        <table:table-row table:style-name="表格18.1">
          <table:table-cell table:style-name="表格18.A2" office:value-type="string">
            <text:p text:style-name="P24" loext:marker-style-name="T78"><text:span text:style-name="T138">③</text:span><text:span text:style-name="T78"/></text:p>
          </table:table-cell>
          <table:table-cell table:style-name="表格18.A2" office:value-type="string">
            <text:p text:style-name="P25" loext:marker-style-name="T78"><text:span text:style-name="T77">本地產生</text:span><text:span text:style-name="T78"/></text:p>
          </table:table-cell>
          <table:table-cell table:style-name="表格18.A2" office:value-type="string">
            <text:p text:style-name="P25" loext:marker-style-name="T78"><text:span text:style-name="T138">network / aggregate </text:span><text:span text:style-name="T77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78"><text:span text:style-name="T138">④</text:span><text:span text:style-name="T78"/></text:p>
          </table:table-cell>
          <table:table-cell table:style-name="表格18.A3" office:value-type="string">
            <text:p text:style-name="P25" loext:marker-style-name="T78"><text:span text:style-name="T138">AS-PATH</text:span><text:span text:style-name="T78"/></text:p>
          </table:table-cell>
          <table:table-cell table:style-name="表格18.A3" office:value-type="string">
            <text:p text:style-name="P25" loext:marker-style-name="T78"><text:span text:style-name="T77">路徑越短（經過 </text:span><text:span text:style-name="T138">AS </text:span><text:span text:style-name="T77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78"><text:span text:style-name="T138">⑤</text:span><text:span text:style-name="T78"/></text:p>
          </table:table-cell>
          <table:table-cell table:style-name="表格18.A2" office:value-type="string">
            <text:p text:style-name="P25" loext:marker-style-name="T78"><text:span text:style-name="T138">Origin</text:span><text:span text:style-name="T78"/></text:p>
          </table:table-cell>
          <table:table-cell table:style-name="表格18.A2" office:value-type="string">
            <text:p text:style-name="P25" loext:marker-style-name="T78"><text:span text:style-name="T138">IGP &gt; EGP &gt; Incomplete</text:span><text:span text:style-name="T78"/></text:p>
          </table:table-cell>
        </table:table-row>
        <table:table-row table:style-name="表格18.1">
          <table:table-cell table:style-name="表格18.A3" office:value-type="string">
            <text:p text:style-name="P24" loext:marker-style-name="T78"><text:span text:style-name="T138">⑥</text:span><text:span text:style-name="T78"/></text:p>
          </table:table-cell>
          <table:table-cell table:style-name="表格18.A3" office:value-type="string">
            <text:p text:style-name="P25" loext:marker-style-name="T78"><text:span text:style-name="T138">MED</text:span><text:span text:style-name="T78"/></text:p>
          </table:table-cell>
          <table:table-cell table:style-name="表格18.A3" office:value-type="string">
            <text:p text:style-name="P25" loext:marker-style-name="T78"><text:span text:style-name="T77">數值越小越優先（只比同一 </text:span><text:span text:style-name="T138">AS </text:span><text:span text:style-name="T77">來的路由）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78"><text:span text:style-name="T138">⑦</text:span><text:span text:style-name="T78"/></text:p>
          </table:table-cell>
          <table:table-cell table:style-name="表格18.A2" office:value-type="string">
            <text:p text:style-name="P25" loext:marker-style-name="T78"><text:span text:style-name="T138">eBGP vs iBGP</text:span><text:span text:style-name="T78"/></text:p>
          </table:table-cell>
          <table:table-cell table:style-name="表格18.A2" office:value-type="string">
            <text:p text:style-name="P25" loext:marker-style-name="T78"><text:span text:style-name="T138">eBGP </text:span><text:span text:style-name="T77">優先於 </text:span><text:span text:style-name="T138">iBGP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78"><text:span text:style-name="T138">⑧</text:span><text:span text:style-name="T78"/></text:p>
          </table:table-cell>
          <table:table-cell table:style-name="表格18.A3" office:value-type="string">
            <text:p text:style-name="P25" loext:marker-style-name="T78"><text:span text:style-name="T138">IGP cost</text:span><text:span text:style-name="T78"/></text:p>
          </table:table-cell>
          <table:table-cell table:style-name="表格18.A3" office:value-type="string">
            <text:p text:style-name="P25" loext:marker-style-name="T78"><text:span text:style-name="T77">到 </text:span><text:span text:style-name="T138">next-hop </text:span><text:span text:style-name="T77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78"><text:span text:style-name="T138">⑨</text:span><text:span text:style-name="T78"/></text:p>
          </table:table-cell>
          <table:table-cell table:style-name="表格18.A2" office:value-type="string">
            <text:p text:style-name="P25" loext:marker-style-name="T78"><text:span text:style-name="T138">Router ID</text:span><text:span text:style-name="T78"/></text:p>
          </table:table-cell>
          <table:table-cell table:style-name="表格18.A2" office:value-type="string">
            <text:p text:style-name="P25" loext:marker-style-name="T78"><text:span text:style-name="T138">Router ID </text:span><text:span text:style-name="T77">最小者優先（最後決勝點）</text:span></text:p>
          </table:table-cell>
        </table:table-row>
      </table:table>
      <text:h text:style-name="P3" text:outline-level="3"><text:span text:style-name="T178">▍</text:span><text:span text:style-name="T179"> ⑥ OSPF </text:span><text:span text:style-name="T180">四種 </text:span><text:span text:style-name="T179">Router</text:span><text:span text:style-name="T180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6" loext:marker-style-name="T65"><text:span text:style-name="T64">類型</text:span><text:span text:style-name="T65"/></text:p>
            </table:table-cell>
            <table:table-cell table:style-name="表格19.A1" office:value-type="string">
              <text:p text:style-name="P6" loext:marker-style-name="T65"><text:span text:style-name="T64">本質</text:span><text:span text:style-name="T65"/></text:p>
            </table:table-cell>
            <table:table-cell table:style-name="表格19.A1" office:value-type="string">
              <text:p text:style-name="P6" loext:marker-style-name="T65"><text:span text:style-name="T64">核心記憶點</text:span><text:span text:style-name="T6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5" loext:marker-style-name="T78"><text:span text:style-name="T138">Internal</text:span><text:span text:style-name="T78"/></text:p>
          </table:table-cell>
          <table:table-cell table:style-name="表格19.A2" office:value-type="string">
            <text:p text:style-name="P25" loext:marker-style-name="T78"><text:span text:style-name="T77">不出 </text:span><text:span text:style-name="T138">Area</text:span></text:p>
          </table:table-cell>
          <table:table-cell table:style-name="表格19.A2" office:value-type="string">
            <text:p text:style-name="P25" loext:marker-style-name="T78"><text:span text:style-name="T77">只負責自己這一區，對外一無所知</text:span><text:span text:style-name="T78"/></text:p>
          </table:table-cell>
        </table:table-row>
        <table:table-row table:style-name="表格19.1">
          <table:table-cell table:style-name="表格19.A3" office:value-type="string">
            <text:p text:style-name="P25" loext:marker-style-name="T78"><text:span text:style-name="T138">Backbone</text:span><text:span text:style-name="T78"/></text:p>
          </table:table-cell>
          <table:table-cell table:style-name="表格19.A3" office:value-type="string">
            <text:p text:style-name="P25" loext:marker-style-name="T78"><text:span text:style-name="T77">在 </text:span><text:span text:style-name="T138">Area 0</text:span></text:p>
          </table:table-cell>
          <table:table-cell table:style-name="表格19.A3" office:value-type="string">
            <text:p text:style-name="P25" loext:marker-style-name="T78"><text:span text:style-name="T77">城市主幹道節點，跨區流量必經</text:span><text:span text:style-name="T78"/></text:p>
          </table:table-cell>
        </table:table-row>
        <table:table-row table:style-name="表格19.1">
          <table:table-cell table:style-name="表格19.A2" office:value-type="string">
            <text:p text:style-name="P25" loext:marker-style-name="T78"><text:span text:style-name="T138">ABR</text:span><text:span text:style-name="T78"/></text:p>
          </table:table-cell>
          <table:table-cell table:style-name="表格19.A2" office:value-type="string">
            <text:p text:style-name="P25" loext:marker-style-name="T78"><text:span text:style-name="T77">跨 </text:span><text:span text:style-name="T138">Area </text:span><text:span text:style-name="T77">橋樑</text:span></text:p>
          </table:table-cell>
          <table:table-cell table:style-name="表格19.A2" office:value-type="string">
            <text:p text:style-name="P25" loext:marker-style-name="T78"><text:span text:style-name="T77">一端連 </text:span><text:span text:style-name="T138">Area 0</text:span><text:span text:style-name="T77">、一端連其他 </text:span><text:span text:style-name="T138">Area</text:span><text:span text:style-name="T77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5" loext:marker-style-name="T78"><text:span text:style-name="T138">ASBR</text:span><text:span text:style-name="T78"/></text:p>
          </table:table-cell>
          <table:table-cell table:style-name="表格19.A3" office:value-type="string">
            <text:p text:style-name="P25" loext:marker-style-name="T78"><text:span text:style-name="T77">跨 </text:span><text:span text:style-name="T138">AS </text:span><text:span text:style-name="T77">入口</text:span></text:p>
          </table:table-cell>
          <table:table-cell table:style-name="表格19.A3" office:value-type="string">
            <text:p text:style-name="P25" loext:marker-style-name="T78"><text:span text:style-name="T77">把外部路由（</text:span><text:span text:style-name="T138">BGP </text:span><text:span text:style-name="T77">等）帶進 </text:span><text:span text:style-name="T138">OSPF</text:span><text:span text:style-name="T77">，是對外的大門</text:span></text:p>
          </table:table-cell>
        </table:table-row>
      </table:table>
      <text:h text:style-name="P3" text:outline-level="3"><text:span text:style-name="T178">▍</text:span><text:span text:style-name="T179"> ⑦ </text:span><text:span text:style-name="T180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2" loext:marker-style-name="T65"><text:span text:style-name="T64">能力</text:span><text:span text:style-name="T65"/></text:p>
            </table:table-cell>
            <table:table-cell table:style-name="表格20.A1" office:value-type="string">
              <text:p text:style-name="P22" loext:marker-style-name="T65"><text:span text:style-name="T74">FW</text:span><text:span text:style-name="T65"/></text:p>
            </table:table-cell>
            <table:table-cell table:style-name="表格20.A1" office:value-type="string">
              <text:p text:style-name="P22" loext:marker-style-name="T65"><text:span text:style-name="T74">WAF</text:span><text:span text:style-name="T65"/></text:p>
            </table:table-cell>
            <table:table-cell table:style-name="表格20.A1" office:value-type="string">
              <text:p text:style-name="P22" loext:marker-style-name="T65"><text:span text:style-name="T74">NGFW</text:span><text:span text:style-name="T65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5" loext:marker-style-name="T78"><text:span text:style-name="T138">IP / Port </text:span><text:span text:style-name="T77">過濾</text:span></text:p>
          </table:table-cell>
          <table:table-cell table:style-name="表格20.A2" office:value-type="string">
            <text:p text:style-name="P24" loext:marker-style-name="T216"><text:span text:style-name="T215">○</text:span><text:span text:style-name="T216"/></text:p>
          </table:table-cell>
          <table:table-cell table:style-name="表格20.A2" office:value-type="string">
            <text:p text:style-name="P24" loext:marker-style-name="T216"><text:span text:style-name="T215">○</text:span><text:span text:style-name="T216"/></text:p>
          </table:table-cell>
          <table:table-cell table:style-name="表格20.A2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20.1">
          <table:table-cell table:style-name="表格20.A3" office:value-type="string">
            <text:p text:style-name="P25" loext:marker-style-name="T78"><text:span text:style-name="T138">HTTP </text:span><text:span text:style-name="T77">內容檢查</text:span></text:p>
          </table:table-cell>
          <table:table-cell table:style-name="表格20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20.A3" office:value-type="string">
            <text:p text:style-name="P24" loext:marker-style-name="T216"><text:span text:style-name="T215">○</text:span><text:span text:style-name="T216"/></text:p>
          </table:table-cell>
          <table:table-cell table:style-name="表格20.A3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20.1">
          <table:table-cell table:style-name="表格20.A2" office:value-type="string">
            <text:p text:style-name="P25" loext:marker-style-name="T78"><text:span text:style-name="T138">DPI </text:span><text:span text:style-name="T77">深度檢查</text:span></text:p>
          </table:table-cell>
          <table:table-cell table:style-name="表格20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20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20.A2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20.1">
          <table:table-cell table:style-name="表格20.A3" office:value-type="string">
            <text:p text:style-name="P25" loext:marker-style-name="T78"><text:span text:style-name="T138">App </text:span><text:span text:style-name="T77">識別 </text:span><text:span text:style-name="T138">/ IPS</text:span></text:p>
          </table:table-cell>
          <table:table-cell table:style-name="表格20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20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20.A3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20.1">
          <table:table-cell table:style-name="表格20.A2" office:value-type="string">
            <text:p text:style-name="P25" loext:marker-style-name="T78"><text:span text:style-name="T138">OSI </text:span><text:span text:style-name="T77">層</text:span></text:p>
          </table:table-cell>
          <table:table-cell table:style-name="表格20.A2" office:value-type="string">
            <text:p text:style-name="P24" loext:marker-style-name="T78"><text:span text:style-name="T138">L3 / L4</text:span><text:span text:style-name="T78"/></text:p>
          </table:table-cell>
          <table:table-cell table:style-name="表格20.A2" office:value-type="string">
            <text:p text:style-name="P24" loext:marker-style-name="T31"><text:span text:style-name="T39">L7</text:span><text:span text:style-name="T31"/></text:p>
          </table:table-cell>
          <table:table-cell table:style-name="表格20.A2" office:value-type="string">
            <text:p text:style-name="P24" loext:marker-style-name="T78"><text:span text:style-name="T138">L3–L7</text:span><text:span text:style-name="T78"/></text:p>
          </table:table-cell>
        </table:table-row>
      </table:table>
      <text:h text:style-name="P3" text:outline-level="3"><text:span text:style-name="T178">▍</text:span><text:span text:style-name="T179"> ⑧ </text:span><text:span text:style-name="T180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6" loext:marker-style-name="T65"><text:span text:style-name="T64">工具</text:span><text:span text:style-name="T65"/></text:p>
            </table:table-cell>
            <table:table-cell table:style-name="表格21.A1" office:value-type="string">
              <text:p text:style-name="P6" loext:marker-style-name="T65"><text:span text:style-name="T64">角色</text:span><text:span text:style-name="T65"/></text:p>
            </table:table-cell>
            <table:table-cell table:style-name="表格21.A1" office:value-type="string">
              <text:p text:style-name="P6" loext:marker-style-name="T65"><text:span text:style-name="T64">關鍵差異</text:span><text:span text:style-name="T65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5" loext:marker-style-name="T78"><text:span text:style-name="T138">Firewall</text:span><text:span text:style-name="T78"/></text:p>
          </table:table-cell>
          <table:table-cell table:style-name="表格21.A2" office:value-type="string">
            <text:p text:style-name="P25" loext:marker-style-name="T78"><text:span text:style-name="T77">大門警衛</text:span><text:span text:style-name="T78"/></text:p>
          </table:table-cell>
          <table:table-cell table:style-name="表格21.A2" office:value-type="string">
            <text:p text:style-name="P25" loext:marker-style-name="T78"><text:span text:style-name="T77">依 </text:span><text:span text:style-name="T138">IP / Port / </text:span><text:span text:style-name="T77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5" loext:marker-style-name="T78"><text:span text:style-name="T138">IDS</text:span><text:span text:style-name="T78"/></text:p>
          </table:table-cell>
          <table:table-cell table:style-name="表格21.A3" office:value-type="string">
            <text:p text:style-name="P25" loext:marker-style-name="T78"><text:span text:style-name="T77">監視器（只看）</text:span><text:span text:style-name="T78"/></text:p>
          </table:table-cell>
          <table:table-cell table:style-name="表格21.A3" office:value-type="string">
            <text:p text:style-name="P25" loext:marker-style-name="T78"><text:span text:style-name="T77">偵測異常 → 只發警報，不阻擋</text:span><text:span text:style-name="T78"/></text:p>
          </table:table-cell>
        </table:table-row>
        <table:table-row table:style-name="表格21.1">
          <table:table-cell table:style-name="表格21.A2" office:value-type="string">
            <text:p text:style-name="P25" loext:marker-style-name="T78"><text:span text:style-name="T138">IPS</text:span><text:span text:style-name="T78"/></text:p>
          </table:table-cell>
          <table:table-cell table:style-name="表格21.A2" office:value-type="string">
            <text:p text:style-name="P25" loext:marker-style-name="T78"><text:span text:style-name="T77">監視器＋警衛</text:span><text:span text:style-name="T78"/></text:p>
          </table:table-cell>
          <table:table-cell table:style-name="表格21.A2" office:value-type="string">
            <text:p text:style-name="P25" loext:marker-style-name="T78"><text:span text:style-name="T77">偵測異常 → 自動阻擋（</text:span><text:span text:style-name="T138">IDS </text:span><text:span text:style-name="T77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5" loext:marker-style-name="T78"><text:span text:style-name="T138">HIDS</text:span><text:span text:style-name="T78"/></text:p>
          </table:table-cell>
          <table:table-cell table:style-name="表格21.A3" office:value-type="string">
            <text:p text:style-name="P25" loext:marker-style-name="T78"><text:span text:style-name="T77">主機型</text:span><text:span text:style-name="T78"/></text:p>
          </table:table-cell>
          <table:table-cell table:style-name="表格21.A3" office:value-type="string">
            <text:p text:style-name="P25" loext:marker-style-name="T78"><text:span text:style-name="T77">看主機 </text:span><text:span text:style-name="T138">Log</text:span><text:span text:style-name="T77">／系統行為</text:span></text:p>
          </table:table-cell>
        </table:table-row>
        <table:table-row table:style-name="表格21.1">
          <table:table-cell table:style-name="表格21.A2" office:value-type="string">
            <text:p text:style-name="P25" loext:marker-style-name="T78"><text:span text:style-name="T138">NIDS</text:span><text:span text:style-name="T78"/></text:p>
          </table:table-cell>
          <table:table-cell table:style-name="表格21.A2" office:value-type="string">
            <text:p text:style-name="P25" loext:marker-style-name="T78"><text:span text:style-name="T77">網路型</text:span><text:span text:style-name="T78"/></text:p>
          </table:table-cell>
          <table:table-cell table:style-name="表格21.A2" office:value-type="string">
            <text:p text:style-name="P25" loext:marker-style-name="T78"><text:span text:style-name="T77">看網路封包／流量</text:span><text:span text:style-name="T78"/></text:p>
          </table:table-cell>
        </table:table-row>
        <table:table-row table:style-name="表格21.1">
          <table:table-cell table:style-name="表格21.A3" office:value-type="string">
            <text:p text:style-name="P25" loext:marker-style-name="T78"><text:span text:style-name="T138">SNMP</text:span><text:span text:style-name="T78"/></text:p>
          </table:table-cell>
          <table:table-cell table:style-name="表格21.A3" office:value-type="string">
            <text:p text:style-name="P25" loext:marker-style-name="T78"><text:span text:style-name="T77">管理室</text:span><text:span text:style-name="T78"/></text:p>
          </table:table-cell>
          <table:table-cell table:style-name="表格21.A3" office:value-type="string">
            <text:p text:style-name="P25" loext:marker-style-name="T78"><text:span text:style-name="T77">管理設備狀態（應用層／</text:span><text:span text:style-name="T138">UDP</text:span><text:span text:style-name="T77">）</text:span></text:p>
          </table:table-cell>
        </table:table-row>
        <table:table-row table:style-name="表格21.1">
          <table:table-cell table:style-name="表格21.A2" office:value-type="string">
            <text:p text:style-name="P25" loext:marker-style-name="T78"><text:span text:style-name="T138">ICMP</text:span><text:span text:style-name="T78"/></text:p>
          </table:table-cell>
          <table:table-cell table:style-name="表格21.A2" office:value-type="string">
            <text:p text:style-name="P25" loext:marker-style-name="T78"><text:span text:style-name="T77">網路測試員</text:span><text:span text:style-name="T78"/></text:p>
          </table:table-cell>
          <table:table-cell table:style-name="表格21.A2" office:value-type="string">
            <text:p text:style-name="P25" loext:marker-style-name="T78"><text:span text:style-name="T77">診斷網路連線（網路層／</text:span><text:span text:style-name="T138">Ping</text:span><text:span text:style-name="T77">）</text:span></text:p>
          </table:table-cell>
        </table:table-row>
      </table:table>
      <text:h text:style-name="P3" text:outline-level="3"><text:span text:style-name="T178">▍</text:span><text:span text:style-name="T179"> ⑨ IOC </text:span><text:span text:style-name="T180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2" loext:marker-style-name="T65"><text:span text:style-name="T64">口訣</text:span><text:span text:style-name="T65"/></text:p>
            </table:table-cell>
            <table:table-cell table:style-name="表格22.A1" office:value-type="string">
              <text:p text:style-name="P22" loext:marker-style-name="T65"><text:span text:style-name="T74">IOC </text:span><text:span text:style-name="T64">類型</text:span></text:p>
            </table:table-cell>
            <table:table-cell table:style-name="表格22.A1" office:value-type="string">
              <text:p text:style-name="P22" loext:marker-style-name="T65"><text:span text:style-name="T64">白話</text:span><text:span text:style-name="T65"/></text:p>
            </table:table-cell>
            <table:table-cell table:style-name="表格22.A1" office:value-type="string">
              <text:p text:style-name="P22" loext:marker-style-name="T65"><text:span text:style-name="T64">對應防禦</text:span><text:span text:style-name="T65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 loext:marker-style-name="T225"><text:span text:style-name="T224">網</text:span><text:span text:style-name="T225"/></text:p>
          </table:table-cell>
          <table:table-cell table:style-name="表格22.A2" office:value-type="string">
            <text:p text:style-name="P25" loext:marker-style-name="T78"><text:span text:style-name="T77">惡意 </text:span><text:span text:style-name="T138">Domain</text:span></text:p>
          </table:table-cell>
          <table:table-cell table:style-name="表格22.A2" office:value-type="string">
            <text:p text:style-name="P25" loext:marker-style-name="T78"><text:span text:style-name="T77">釣魚網站網址</text:span><text:span text:style-name="T78"/></text:p>
          </table:table-cell>
          <table:table-cell table:style-name="表格22.A2" office:value-type="string">
            <text:p text:style-name="P25" loext:marker-style-name="T78"><text:span text:style-name="T138">DNS </text:span><text:span text:style-name="T77">封鎖網域</text:span></text:p>
          </table:table-cell>
        </table:table-row>
        <table:table-row table:style-name="表格22.1">
          <table:table-cell table:style-name="表格22.A3" office:value-type="string">
            <text:p text:style-name="P24" loext:marker-style-name="T225"><text:span text:style-name="T224">檔</text:span><text:span text:style-name="T225"/></text:p>
          </table:table-cell>
          <table:table-cell table:style-name="表格22.A3" office:value-type="string">
            <text:p text:style-name="P25" loext:marker-style-name="T78"><text:span text:style-name="T77">惡意 </text:span><text:span text:style-name="T138">Hash</text:span></text:p>
          </table:table-cell>
          <table:table-cell table:style-name="表格22.A3" office:value-type="string">
            <text:p text:style-name="P25" loext:marker-style-name="T78"><text:span text:style-name="T77">惡意程式特徵碼（改名也認得）</text:span><text:span text:style-name="T78"/></text:p>
          </table:table-cell>
          <table:table-cell table:style-name="表格22.A3" office:value-type="string">
            <text:p text:style-name="P25" loext:marker-style-name="T78"><text:span text:style-name="T77">防毒比對特徵</text:span><text:span text:style-name="T78"/></text:p>
          </table:table-cell>
        </table:table-row>
        <table:table-row table:style-name="表格22.1">
          <table:table-cell table:style-name="表格22.A2" office:value-type="string">
            <text:p text:style-name="P24" loext:marker-style-name="T225"><text:span text:style-name="T224">連</text:span><text:span text:style-name="T225"/></text:p>
          </table:table-cell>
          <table:table-cell table:style-name="表格22.A2" office:value-type="string">
            <text:p text:style-name="P25" loext:marker-style-name="T78"><text:span text:style-name="T77">惡意 </text:span><text:span text:style-name="T138">IP</text:span></text:p>
          </table:table-cell>
          <table:table-cell table:style-name="表格22.A2" office:value-type="string">
            <text:p text:style-name="P25" loext:marker-style-name="T78"><text:span text:style-name="T77">感染後對外異常連線目標</text:span><text:span text:style-name="T78"/></text:p>
          </table:table-cell>
          <table:table-cell table:style-name="表格22.A2" office:value-type="string">
            <text:p text:style-name="P25" loext:marker-style-name="T78"><text:span text:style-name="T138">FW / NGFW </text:span><text:span text:style-name="T77">封鎖</text:span></text:p>
          </table:table-cell>
        </table:table-row>
        <table:table-row table:style-name="表格22.1">
          <table:table-cell table:style-name="表格22.A3" office:value-type="string">
            <text:p text:style-name="P24" loext:marker-style-name="T225"><text:span text:style-name="T224">控</text:span><text:span text:style-name="T225"/></text:p>
          </table:table-cell>
          <table:table-cell table:style-name="表格22.A3" office:value-type="string">
            <text:p text:style-name="P25" loext:marker-style-name="T78"><text:span text:style-name="T138">C2 Server</text:span><text:span text:style-name="T78"/></text:p>
          </table:table-cell>
          <table:table-cell table:style-name="表格22.A3" office:value-type="string">
            <text:p text:style-name="P25" loext:marker-style-name="T78"><text:span text:style-name="T77">駭客遠端操控總部</text:span><text:span text:style-name="T78"/></text:p>
          </table:table-cell>
          <table:table-cell table:style-name="表格22.A3" office:value-type="string">
            <text:p text:style-name="P25" loext:marker-style-name="T78"><text:span text:style-name="T138">SIEM / IDS </text:span><text:span text:style-name="T77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9"><text:span text:style-name="T194">必記：</text:span><text:span text:style-name="T148">IOC </text:span><text:span text:style-name="T99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⑩ DNS </text:span><text:span text:style-name="T180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6" loext:marker-style-name="T69"><text:span text:style-name="T68">項目</text:span><text:span text:style-name="T69"/></text:p>
            </table:table-cell>
            <table:table-cell table:style-name="表格23.A1" office:value-type="string">
              <text:p text:style-name="P6" loext:marker-style-name="T69"><text:span text:style-name="T75">Recursive </text:span><text:span text:style-name="T68">遞迴</text:span></text:p>
            </table:table-cell>
            <table:table-cell table:style-name="表格23.A1" office:value-type="string">
              <text:p text:style-name="P6" loext:marker-style-name="T69"><text:span text:style-name="T75">Iterative </text:span><text:span text:style-name="T68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 loext:marker-style-name="T125"><text:span text:style-name="T124">口訣</text:span><text:span text:style-name="T125"/></text:p>
          </table:table-cell>
          <table:table-cell table:style-name="表格23.A2" office:value-type="string">
            <text:p text:style-name="P25" loext:marker-style-name="T187"><text:span text:style-name="T186">代查到底</text:span><text:span text:style-name="T187"/></text:p>
          </table:table-cell>
          <table:table-cell table:style-name="表格23.A2" office:value-type="string">
            <text:p text:style-name="P25" loext:marker-style-name="T34"><text:span text:style-name="T33">逐層詢問</text:span><text:span text:style-name="T34"/></text:p>
          </table:table-cell>
        </table:table-row>
        <table:table-row table:style-name="表格23.1">
          <table:table-cell table:style-name="表格23.A3" office:value-type="string">
            <text:p text:style-name="P25" loext:marker-style-name="T125"><text:span text:style-name="T124">誰去問</text:span><text:span text:style-name="T125"/></text:p>
          </table:table-cell>
          <table:table-cell table:style-name="表格23.A3" office:value-type="string">
            <text:p text:style-name="P25" loext:marker-style-name="T125"><text:span text:style-name="T167">DNS </text:span><text:span text:style-name="T124">伺服器代你問完</text:span></text:p>
          </table:table-cell>
          <table:table-cell table:style-name="表格23.A3" office:value-type="string">
            <text:p text:style-name="P25" loext:marker-style-name="T125"><text:span text:style-name="T124">你自己逐層查詢</text:span><text:span text:style-name="T125"/></text:p>
          </table:table-cell>
        </table:table-row>
        <table:table-row table:style-name="表格23.1">
          <table:table-cell table:style-name="表格23.A2" office:value-type="string">
            <text:p text:style-name="P25" loext:marker-style-name="T125"><text:span text:style-name="T124">問幾次</text:span><text:span text:style-name="T125"/></text:p>
          </table:table-cell>
          <table:table-cell table:style-name="表格23.A2" office:value-type="string">
            <text:p text:style-name="P25" loext:marker-style-name="T125"><text:span text:style-name="T124">只問 </text:span><text:span text:style-name="T167">1 </text:span><text:span text:style-name="T124">次</text:span></text:p>
          </table:table-cell>
          <table:table-cell table:style-name="表格23.A2" office:value-type="string">
            <text:p text:style-name="P25" loext:marker-style-name="T125"><text:span text:style-name="T124">每層各問一次，共多次</text:span><text:span text:style-name="T125"/></text:p>
          </table:table-cell>
        </table:table-row>
        <table:table-row table:style-name="表格23.1">
          <table:table-cell table:style-name="表格23.A3" office:value-type="string">
            <text:p text:style-name="P25" loext:marker-style-name="T125"><text:span text:style-name="T124">常見場合</text:span><text:span text:style-name="T125"/></text:p>
          </table:table-cell>
          <table:table-cell table:style-name="表格23.A3" office:value-type="string">
            <text:p text:style-name="P25" loext:marker-style-name="T125"><text:span text:style-name="T124">一般使用者 → </text:span><text:span text:style-name="T167">Local DNS</text:span></text:p>
          </table:table-cell>
          <table:table-cell table:style-name="表格23.A3" office:value-type="string">
            <text:p text:style-name="P25" loext:marker-style-name="T125"><text:span text:style-name="T167">DNS </text:span><text:span text:style-name="T124">伺服器之間互查</text:span></text:p>
          </table:table-cell>
        </table:table-row>
      </table:table>
      <text:h text:style-name="P3" text:outline-level="3"><text:soft-page-break/><text:span text:style-name="T178">▍</text:span><text:span text:style-name="T179"> ⑪ </text:span><text:span text:style-name="T180">企業資安關鍵對：</text:span><text:span text:style-name="T179">RTO/RPO</text:span><text:span text:style-name="T180">、</text:span><text:span text:style-name="T179">EDR/MDR</text:span><text:span text:style-name="T180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6" loext:marker-style-name="T65"><text:span text:style-name="T64">指標 </text:span><text:span text:style-name="T74">/ </text:span><text:span text:style-name="T64">名詞</text:span></text:p>
            </table:table-cell>
            <table:table-cell table:style-name="表格24.A1" office:value-type="string">
              <text:p text:style-name="P6" loext:marker-style-name="T65"><text:span text:style-name="T64">意義</text:span><text:span text:style-name="T65"/></text:p>
            </table:table-cell>
            <table:table-cell table:style-name="表格24.A1" office:value-type="string">
              <text:p text:style-name="P6" loext:marker-style-name="T65"><text:span text:style-name="T64">一句話記憶</text:span><text:span text:style-name="T65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5" loext:marker-style-name="T78"><text:span text:style-name="T138">RTO</text:span><text:span text:style-name="T78"/></text:p>
          </table:table-cell>
          <table:table-cell table:style-name="表格24.A2" office:value-type="string">
            <text:p text:style-name="P25" loext:marker-style-name="T78"><text:span text:style-name="T138">Recovery Time Objective </text:span><text:span text:style-name="T77">復原時間目標</text:span></text:p>
          </table:table-cell>
          <table:table-cell table:style-name="表格24.A2" office:value-type="string">
            <text:p text:style-name="P25" loext:marker-style-name="T49"><text:span text:style-name="T48">停機時間（能停多久）</text:span><text:span text:style-name="T49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78"><text:span text:style-name="T138">RPO</text:span><text:span text:style-name="T78"/></text:p>
          </table:table-cell>
          <table:table-cell table:style-name="表格24.A3" office:value-type="string">
            <text:p text:style-name="P25" loext:marker-style-name="T78"><text:span text:style-name="T138">Recovery Point Objective </text:span><text:span text:style-name="T77">復原點目標</text:span></text:p>
          </table:table-cell>
          <table:table-cell table:style-name="表格24.A3" office:value-type="string">
            <text:p text:style-name="P25" loext:marker-style-name="T49"><text:span text:style-name="T48">資料損失量（能丟幾小時）</text:span><text:span text:style-name="T49"/></text:p>
          </table:table-cell>
        </table:table-row>
        <table:table-row table:style-name="表格24.1">
          <table:table-cell table:style-name="表格24.A2" office:value-type="string">
            <text:p text:style-name="P25" loext:marker-style-name="T78"><text:span text:style-name="T138">EDR</text:span><text:span text:style-name="T78"/></text:p>
          </table:table-cell>
          <table:table-cell table:style-name="表格24.A2" office:value-type="string">
            <text:p text:style-name="P25" loext:marker-style-name="T78"><text:span text:style-name="T138">Endpoint Detection &amp; Response</text:span><text:span text:style-name="T78"/></text:p>
          </table:table-cell>
          <table:table-cell table:style-name="表格24.A2" office:value-type="string">
            <text:p text:style-name="P25" loext:marker-style-name="T78"><text:span text:style-name="T77">自己買工具守（需內部資安人員）</text:span><text:span text:style-name="T78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78"><text:span text:style-name="T138">MDR</text:span><text:span text:style-name="T78"/></text:p>
          </table:table-cell>
          <table:table-cell table:style-name="表格24.A3" office:value-type="string">
            <text:p text:style-name="P25" loext:marker-style-name="T78"><text:span text:style-name="T138">Managed Detection &amp; Response</text:span><text:span text:style-name="T78"/></text:p>
          </table:table-cell>
          <table:table-cell table:style-name="表格24.A3" office:value-type="string">
            <text:p text:style-name="P25" loext:marker-style-name="T78"><text:span text:style-name="T77">請資安公司委外守（</text:span><text:span text:style-name="T138">24</text:span><text:span text:style-name="T77">／</text:span><text:span text:style-name="T138">7</text:span><text:span text:style-name="T77">，適合中小企業）</text:span></text:p>
          </table:table-cell>
        </table:table-row>
      </table:table>
      <text:h text:style-name="P3" text:outline-level="3"><text:span text:style-name="T178">▍</text:span><text:span text:style-name="T179"> ⑫ </text:span><text:span text:style-name="T180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2" loext:marker-style-name="T65"><text:span text:style-name="T74">Protocol </text:span><text:span text:style-name="T64">值</text:span></text:p>
            </table:table-cell>
            <table:table-cell table:style-name="表格25.A1" office:value-type="string">
              <text:p text:style-name="P22" loext:marker-style-name="T65"><text:span text:style-name="T74">DF Flag</text:span><text:span text:style-name="T65"/></text:p>
            </table:table-cell>
            <table:table-cell table:style-name="表格25.A1" office:value-type="string">
              <text:p text:style-name="P22" loext:marker-style-name="T65"><text:span text:style-name="T74">MF Flag</text:span><text:span text:style-name="T65"/></text:p>
            </table:table-cell>
            <table:table-cell table:style-name="表格25.A1" office:value-type="string">
              <text:p text:style-name="P22" loext:marker-style-name="T65"><text:span text:style-name="T64">關鍵公式</text:span><text:span text:style-name="T65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5" loext:marker-style-name="T78"><text:span text:style-name="T138">ICMP=1 / TCP=6 / UDP=17</text:span><text:span text:style-name="T78"/></text:p>
          </table:table-cell>
          <table:table-cell table:style-name="表格25.A2" office:value-type="string">
            <text:p text:style-name="P25" loext:marker-style-name="T78"><text:span text:style-name="T138">DF=1</text:span><text:span text:style-name="T77">：禁止切，太大就丟＋</text:span><text:span text:style-name="T138">ICMP</text:span></text:p>
          </table:table-cell>
          <table:table-cell table:style-name="表格25.A2" office:value-type="string">
            <text:p text:style-name="P25" loext:marker-style-name="T78"><text:span text:style-name="T138">MF=1</text:span><text:span text:style-name="T77">：後面還有分段（最後段</text:span><text:span text:style-name="T138">=0</text:span><text:span text:style-name="T77">）</text:span></text:p>
          </table:table-cell>
          <table:table-cell table:style-name="表格25.A2" office:value-type="string">
            <text:p text:style-name="P25" loext:marker-style-name="T31"><text:span text:style-name="T39">Offset=</text:span><text:span text:style-name="T32">起始</text:span><text:span text:style-name="T39">÷8</text:span><text:span text:style-name="T32">；</text:span><text:span text:style-name="T39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8"><text:span text:style-name="T176">✅ <text:s/></text:span><text:span text:style-name="T47">提醒</text:span></text:p>
            <text:p text:style-name="P9" loext:marker-style-name="T101"><text:span text:style-name="T99">以上即全書精華。接下來各篇為完整觀念詳解、生活比喻、申論寫法與考試陷阱，務必至少讀過一遍以建立理解，再用本篇反覆速記。</text:span><text:span text:style-name="T101"/></text:p>
          </table:table-cell>
          <table:covered-table-cell/>
          <table:covered-table-cell/>
          <table:covered-table-cell/>
        </table:table-row>
      </table:table>
      <text:h text:style-name="P13" text:outline-level="1" loext:marker-style-name="T67"><text:span text:style-name="T66">第 一 篇　網路基礎架構：</text:span><text:span text:style-name="T67">OSI / TCP-IP · </text:span><text:span text:style-name="T66">協定 </text:span><text:span text:style-name="T67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><text:span text:style-name="T176">🌐 <text:s/></text:span><text:span text:style-name="T47">本篇重點</text:span></text:p>
            <text:p text:style-name="P9" loext:marker-style-name="T101"><text:span text:style-name="T99">本篇先建立整個網路的「分層」骨架，再逐層認識常見協定，最後切入網路層三大工作與兩個必考工具（</text:span><text:span text:style-name="T148">ARP</text:span><text:span text:style-name="T99">、</text:span><text:span text:style-name="T148">Traceroute</text:span><text:span text:style-name="T99">）。理解每一層的「責任」，比死背名詞更重要。</text:span></text:p>
          </table:table-cell>
        </table:table-row>
      </table:table>
      <text:h text:style-name="P2" text:outline-level="2" loext:marker-style-name="T27"><text:span text:style-name="T28">一、用「寄信」理解分層（修正版）</text:span><text:span text:style-name="T27"/></text:h>
      <text:p text:style-name="P32" loext:marker-style-name="T101"><text:span text:style-name="T99">每一層就像寄信流程中各自獨立的環節，各司其職、互不干涉：</text:span><text:span text:style-name="T10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6" loext:marker-style-name="T65"><text:span text:style-name="T74">TCP/IP </text:span><text:span text:style-name="T64">層</text:span></text:p>
            </table:table-cell>
            <table:table-cell table:style-name="表格27.A1" office:value-type="string">
              <text:p text:style-name="P6" loext:marker-style-name="T65"><text:span text:style-name="T64">郵寄比喻</text:span><text:span text:style-name="T65"/></text:p>
            </table:table-cell>
            <table:table-cell table:style-name="表格27.A1" office:value-type="string">
              <text:p text:style-name="P6" loext:marker-style-name="T65"><text:span text:style-name="T64">實際負責的事</text:span><text:span text:style-name="T65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5" loext:marker-style-name="T78"><text:span text:style-name="T138">🟢 </text:span><text:span text:style-name="T77">應用層 </text:span><text:span text:style-name="T138">Application</text:span></text:p>
          </table:table-cell>
          <table:table-cell table:style-name="表格27.A2" office:value-type="string">
            <text:p text:style-name="P25" loext:marker-style-name="T78"><text:span text:style-name="T77">決定「</text:span><text:span text:style-name="T86">寄什麼內容</text:span><text:span text:style-name="T77">」（信的內容與格式）</text:span></text:p>
          </table:table-cell>
          <table:table-cell table:style-name="表格27.A2" office:value-type="string">
            <text:p text:style-name="P25" loext:marker-style-name="T78"><text:span text:style-name="T138">HTTP</text:span><text:span text:style-name="T77">、</text:span><text:span text:style-name="T138">DNS</text:span><text:span text:style-name="T77">、</text:span><text:span text:style-name="T138">DHCP</text:span><text:span text:style-name="T77">、</text:span><text:span text:style-name="T138">SSH …</text:span><text:span text:style-name="T77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5" loext:marker-style-name="T78"><text:span text:style-name="T138">🟡 </text:span><text:span text:style-name="T77">傳輸層 </text:span><text:span text:style-name="T138">Transport</text:span></text:p>
          </table:table-cell>
          <table:table-cell table:style-name="表格27.A3" office:value-type="string">
            <text:p text:style-name="P25" loext:marker-style-name="T237"><text:span text:style-name="T236">切分、編頁碼、確認收件</text:span><text:span text:style-name="T237"/></text:p>
          </table:table-cell>
          <table:table-cell table:style-name="表格27.A3" office:value-type="string">
            <text:p text:style-name="P25" loext:marker-style-name="T78"><text:span text:style-name="T138">TCP / UDP</text:span><text:span text:style-name="T77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5" loext:marker-style-name="T78"><text:span text:style-name="T138">🔵 </text:span><text:span text:style-name="T77">網路層 </text:span><text:span text:style-name="T138">Network</text:span></text:p>
          </table:table-cell>
          <table:table-cell table:style-name="表格27.A2" office:value-type="string">
            <text:p text:style-name="P25" loext:marker-style-name="T78"><text:span text:style-name="T240">寫地址＋規劃路線</text:span><text:span text:style-name="T77">（郵遞區號＋郵局選路）</text:span></text:p>
          </table:table-cell>
          <table:table-cell table:style-name="表格27.A2" office:value-type="string">
            <text:p text:style-name="P25" loext:marker-style-name="T252"><text:span text:style-name="T241">IP </text:span><text:span text:style-name="T251">路由、</text:span><text:span text:style-name="T241">ICMP</text:span><text:span text:style-name="T251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5" loext:marker-style-name="T78"><text:span text:style-name="T138">🟠 </text:span><text:span text:style-name="T77">連結層 </text:span><text:span text:style-name="T138">Link</text:span></text:p>
          </table:table-cell>
          <table:table-cell table:style-name="表格27.A3" office:value-type="string">
            <text:p text:style-name="P25" loext:marker-style-name="T78"><text:span text:style-name="T77">當前路段的區域配送</text:span><text:span text:style-name="T78"/></text:p>
          </table:table-cell>
          <table:table-cell table:style-name="表格27.A3" office:value-type="string">
            <text:p text:style-name="P25" loext:marker-style-name="T306"><text:span text:style-name="T299">Ethernet</text:span><text:span text:style-name="T304">、</text:span><text:span text:style-name="T299">ARP</text:span><text:span text:style-name="T304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8"><text:span text:style-name="T176">⚠️ <text:s/></text:span><text:span text:style-name="T198">舊版三大比喻的錯誤</text:span></text:p>
            <text:p text:style-name="P9"><text:span text:style-name="T157">❌ </text:span><text:span text:style-name="T114">舊：「寫地址 → 應用層」　</text:span><text:span text:style-name="T148">IP </text:span><text:span text:style-name="T99">位址屬於網路層；應用層負責的是「內容與格式」，不是地址。</text:span></text:p>
            <text:p text:style-name="P10"><text:span text:style-name="T157">❌ </text:span><text:span text:style-name="T114">舊：「打包 → 傳輸層」　</text:span><text:span text:style-name="T99">傳輸層還負責切割、編號、重傳、流量控制，遠不只「打包」。</text:span></text:p>
            <text:p text:style-name="P10"><text:span text:style-name="T157">❌ </text:span><text:span text:style-name="T114">舊：「實際搬運 → 連結層」　</text:span><text:span text:style-name="T9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32" loext:marker-style-name="T101"><text:span text:style-name="T158">OSI </text:span><text:span text:style-name="T115">是理論模型（</text:span><text:span text:style-name="T158">7 </text:span><text:span text:style-name="T115">層）</text:span><text:span text:style-name="T99">；</text:span><text:span text:style-name="T160">TCP/IP </text:span><text:span text:style-name="T117">是實際使用的模型（</text:span><text:span text:style-name="T160">4 </text:span><text:span text:style-name="T117">層）</text:span><text:span text:style-name="T99">。</text:span><text:span text:style-name="T148">TCP/IP </text:span><text:span text:style-name="T99">將 </text:span><text:span text:style-name="T148">OSI </text:span><text:span text:style-name="T99">的 </text:span><text:span text:style-name="T148">Session </text:span><text:span text:style-name="T99">層與 </text:span><text:span text:style-name="T148">Presentation </text:span><text:span text:style-name="T99">層併入 </text:span><text:span text:style-name="T148">Application </text:span><text:span text:style-name="T99">層，並把 </text:span><text:span text:style-name="T148">Physical </text:span><text:span text:style-name="T99">併入 </text:span><text:span text:style-name="T148">Link</text:span><text:span text:style-name="T99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2" loext:marker-style-name="T65"><text:span text:style-name="T64">層號</text:span><text:span text:style-name="T65"/></text:p>
            </table:table-cell>
            <table:table-cell table:style-name="表格28.A1" office:value-type="string">
              <text:p text:style-name="P22" loext:marker-style-name="T65"><text:span text:style-name="T74">OSI </text:span><text:span text:style-name="T64">層名</text:span></text:p>
            </table:table-cell>
            <table:table-cell table:style-name="表格28.A1" office:value-type="string">
              <text:p text:style-name="P22" loext:marker-style-name="T65"><text:span text:style-name="T64">主要功能</text:span><text:span text:style-name="T65"/></text:p>
            </table:table-cell>
            <table:table-cell table:style-name="表格28.A1" office:value-type="string">
              <text:p text:style-name="P22" loext:marker-style-name="T65"><text:span text:style-name="T74">TCP/IP </text:span><text:span text:style-name="T64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 loext:marker-style-name="T78"><text:span text:style-name="T138">7</text:span><text:span text:style-name="T78"/></text:p>
          </table:table-cell>
          <table:table-cell table:style-name="表格28.A2" office:value-type="string">
            <text:p text:style-name="P25" loext:marker-style-name="T78"><text:span text:style-name="T138">Application </text:span><text:span text:style-name="T88">應</text:span><text:span text:style-name="T77">用層</text:span></text:p>
          </table:table-cell>
          <table:table-cell table:style-name="表格28.A2" office:value-type="string">
            <text:p text:style-name="P25" loext:marker-style-name="T78"><text:span text:style-name="T77">使用者直接操作：</text:span><text:span text:style-name="T138">HTTP</text:span><text:span text:style-name="T77">、</text:span><text:span text:style-name="T138">DNS</text:span><text:span text:style-name="T77">、</text:span><text:span text:style-name="T138">DHCP</text:span></text:p>
          </table:table-cell>
          <table:table-cell table:style-name="表格28.A2" office:value-type="string">
            <text:p text:style-name="P25" loext:marker-style-name="T78"><text:span text:style-name="T138">Application</text:span><text:span text:style-name="T78"/></text:p>
          </table:table-cell>
        </table:table-row>
        <table:table-row table:style-name="表格28.1">
          <table:table-cell table:style-name="表格28.A3" office:value-type="string">
            <text:p text:style-name="P24" loext:marker-style-name="T78"><text:span text:style-name="T138">6</text:span><text:span text:style-name="T78"/></text:p>
          </table:table-cell>
          <table:table-cell table:style-name="表格28.A3" office:value-type="string">
            <text:p text:style-name="P25" loext:marker-style-name="T78"><text:span text:style-name="T138">Presentation </text:span><text:span text:style-name="T88">表</text:span><text:span text:style-name="T77">示層</text:span></text:p>
          </table:table-cell>
          <table:table-cell table:style-name="表格28.A3" office:value-type="string">
            <text:p text:style-name="P25" loext:marker-style-name="T331"><text:span text:style-name="T330">資料格式轉換、加解密、壓縮</text:span><text:span text:style-name="T331"/></text:p>
          </table:table-cell>
          <table:table-cell table:style-name="表格28.A3" office:value-type="string">
            <text:p text:style-name="P25" loext:marker-style-name="T78"><text:span text:style-name="T138">↑ </text:span><text:span text:style-name="T77">併入 </text:span><text:span text:style-name="T138">Application</text:span></text:p>
          </table:table-cell>
        </table:table-row>
        <table:table-row table:style-name="表格28.1">
          <table:table-cell table:style-name="表格28.A2" office:value-type="string">
            <text:p text:style-name="P24" loext:marker-style-name="T78"><text:span text:style-name="T138">5</text:span><text:span text:style-name="T78"/></text:p>
          </table:table-cell>
          <table:table-cell table:style-name="表格28.A2" office:value-type="string">
            <text:p text:style-name="P25" loext:marker-style-name="T78"><text:span text:style-name="T138">Session </text:span><text:span text:style-name="T88">會</text:span><text:span text:style-name="T77">話層</text:span></text:p>
          </table:table-cell>
          <table:table-cell table:style-name="表格28.A2" office:value-type="string">
            <text:p text:style-name="P25" loext:marker-style-name="T346"><text:span text:style-name="T345">連線的建立、維持與終止</text:span><text:span text:style-name="T346"/></text:p>
          </table:table-cell>
          <table:table-cell table:style-name="表格28.A2" office:value-type="string">
            <text:p text:style-name="P25" loext:marker-style-name="T78"><text:span text:style-name="T138">↑ </text:span><text:span text:style-name="T77">併入 </text:span><text:span text:style-name="T138">Application</text:span></text:p>
          </table:table-cell>
        </table:table-row>
        <table:table-row table:style-name="表格28.1">
          <table:table-cell table:style-name="表格28.A3" office:value-type="string">
            <text:p text:style-name="P24" loext:marker-style-name="T78"><text:span text:style-name="T138">4</text:span><text:span text:style-name="T78"/></text:p>
          </table:table-cell>
          <table:table-cell table:style-name="表格28.A3" office:value-type="string">
            <text:p text:style-name="P25" loext:marker-style-name="T78"><text:span text:style-name="T138">Transport </text:span><text:span text:style-name="T88">傳</text:span><text:span text:style-name="T77">輸層</text:span></text:p>
          </table:table-cell>
          <table:table-cell table:style-name="表格28.A3" office:value-type="string">
            <text:p text:style-name="P25" loext:marker-style-name="T78"><text:span text:style-name="T77">端對端傳輸控制（</text:span><text:span text:style-name="T138">TCP / UDP</text:span><text:span text:style-name="T77">）</text:span></text:p>
          </table:table-cell>
          <table:table-cell table:style-name="表格28.A3" office:value-type="string">
            <text:p text:style-name="P25" loext:marker-style-name="T78"><text:span text:style-name="T138">Transport</text:span><text:span text:style-name="T78"/></text:p>
          </table:table-cell>
        </table:table-row>
        <table:table-row table:style-name="表格28.1">
          <table:table-cell table:style-name="表格28.A2" office:value-type="string">
            <text:p text:style-name="P24" loext:marker-style-name="T78"><text:span text:style-name="T138">3</text:span><text:span text:style-name="T78"/></text:p>
          </table:table-cell>
          <table:table-cell table:style-name="表格28.A2" office:value-type="string">
            <text:p text:style-name="P25" loext:marker-style-name="T78"><text:span text:style-name="T138">Network </text:span><text:span text:style-name="T88">網</text:span><text:span text:style-name="T77">路層</text:span></text:p>
          </table:table-cell>
          <table:table-cell table:style-name="表格28.A2" office:value-type="string">
            <text:p text:style-name="P25" loext:marker-style-name="T306"><text:span text:style-name="T299">IP </text:span><text:span text:style-name="T304">路由、</text:span><text:span text:style-name="T299">ICMP </text:span><text:span text:style-name="T304">錯誤回報</text:span></text:p>
          </table:table-cell>
          <table:table-cell table:style-name="表格28.A2" office:value-type="string">
            <text:p text:style-name="P25" loext:marker-style-name="T78"><text:span text:style-name="T138">Internet</text:span><text:span text:style-name="T78"/></text:p>
          </table:table-cell>
        </table:table-row>
        <table:table-row table:style-name="表格28.1">
          <table:table-cell table:style-name="表格28.A3" office:value-type="string">
            <text:p text:style-name="P24" loext:marker-style-name="T78"><text:span text:style-name="T138">2</text:span><text:span text:style-name="T78"/></text:p>
          </table:table-cell>
          <table:table-cell table:style-name="表格28.A3" office:value-type="string">
            <text:p text:style-name="P25" loext:marker-style-name="T78"><text:span text:style-name="T138">Data Link </text:span><text:span text:style-name="T349">資</text:span><text:span text:style-name="T77">料鏈結層</text:span></text:p>
          </table:table-cell>
          <table:table-cell table:style-name="表格28.A3" office:value-type="string">
            <text:p text:style-name="P25" loext:marker-style-name="T358"><text:span text:style-name="T351">MAC </text:span><text:span text:style-name="T357">位址、區域網路傳輸（</text:span><text:span text:style-name="T351">ARP</text:span><text:span text:style-name="T357">）</text:span></text:p>
          </table:table-cell>
          <table:table-cell table:style-name="表格28.A3" office:value-type="string">
            <text:p text:style-name="P25" loext:marker-style-name="T78"><text:span text:style-name="T138">Link</text:span><text:span text:style-name="T78"/></text:p>
          </table:table-cell>
        </table:table-row>
        <table:table-row table:style-name="表格28.1">
          <table:table-cell table:style-name="表格28.A2" office:value-type="string">
            <text:p text:style-name="P24" loext:marker-style-name="T78"><text:span text:style-name="T138">1</text:span><text:span text:style-name="T78"/></text:p>
          </table:table-cell>
          <table:table-cell table:style-name="表格28.A2" office:value-type="string">
            <text:p text:style-name="P25" loext:marker-style-name="T78"><text:span text:style-name="T138">Physical </text:span><text:span text:style-name="T88">實</text:span><text:span text:style-name="T77">體層</text:span></text:p>
          </table:table-cell>
          <table:table-cell table:style-name="表格28.A2" office:value-type="string">
            <text:p text:style-name="P25" loext:marker-style-name="T78"><text:span text:style-name="T77">電訊號、光訊號、無線電波</text:span><text:span text:style-name="T78"/></text:p>
          </table:table-cell>
          <table:table-cell table:style-name="表格28.A2" office:value-type="string">
            <text:p text:style-name="P25" loext:marker-style-name="T78"><text:span text:style-name="T138">↑ </text:span><text:span text:style-name="T77">併入 </text:span><text:span text:style-name="T138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8"><text:span text:style-name="T176">⚡ <text:s/></text:span><text:span text:style-name="T180">速記</text:span></text:p>
            <text:p text:style-name="P9" loext:marker-style-name="T101"><text:span text:style-name="T158">OSI → 7 </text:span><text:span text:style-name="T115">層（理論）</text:span><text:span text:style-name="T99">，</text:span><text:span text:style-name="T160">TCP/IP → 4 </text:span><text:span text:style-name="T117">層（實際）</text:span><text:span text:style-name="T99">；差別在於 </text:span><text:span text:style-name="T148">TCP/IP </text:span><text:span text:style-name="T99">少了獨立的 </text:span><text:span text:style-name="T148">Session </text:span><text:span text:style-name="T99">與 </text:span><text:span text:style-name="T148">Presentation </text:span><text:span text:style-name="T99">兩層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2" loext:marker-style-name="T65"><text:span text:style-name="T74">🟢 Application </text:span><text:span text:style-name="T64">應用層</text:span></text:p>
            </table:table-cell>
            <table:table-cell table:style-name="表格29.A1" office:value-type="string">
              <text:p text:style-name="P22" loext:marker-style-name="T65"><text:span text:style-name="T74">🟡 Transport </text:span><text:span text:style-name="T64">傳輸層</text:span></text:p>
            </table:table-cell>
            <table:table-cell table:style-name="表格29.A1" office:value-type="string">
              <text:p text:style-name="P22" loext:marker-style-name="T65"><text:span text:style-name="T74">🔵 Network </text:span><text:span text:style-name="T64">網路層</text:span></text:p>
            </table:table-cell>
            <table:table-cell table:style-name="表格29.A1" office:value-type="string">
              <text:p text:style-name="P22" loext:marker-style-name="T65"><text:span text:style-name="T74">🟠 Link </text:span><text:span text:style-name="T64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5" loext:marker-style-name="T78"><text:span text:style-name="T138">HTTP / HTTPS</text:span><text:span text:style-name="T77">、</text:span><text:span text:style-name="T138">DNS</text:span><text:span text:style-name="T77">、</text:span><text:span text:style-name="T138">DHCP</text:span><text:span text:style-name="T77">、</text:span><text:span text:style-name="T138">SSH</text:span><text:span text:style-name="T77">、</text:span><text:span text:style-name="T138">MQTT</text:span><text:span text:style-name="T77">、</text:span><text:span text:style-name="T139">OSPF*</text:span></text:p>
          </table:table-cell>
          <table:table-cell table:style-name="表格29.A2" office:value-type="string">
            <text:p text:style-name="P25" loext:marker-style-name="T400"><text:span text:style-name="T396">TCP</text:span><text:span text:style-name="T399">（可靠傳輸）、</text:span><text:span text:style-name="T396">UDP</text:span><text:span text:style-name="T399">（高速傳輸）</text:span></text:p>
          </table:table-cell>
          <table:table-cell table:style-name="表格29.A2" office:value-type="string">
            <text:p text:style-name="P25" loext:marker-style-name="T78"><text:span text:style-name="T138">IP</text:span><text:span text:style-name="T77">（路由定址）、</text:span><text:span text:style-name="T420">ICMP</text:span><text:span text:style-name="T423">（錯誤回報 </text:span><text:span text:style-name="T420">/ ping</text:span><text:span text:style-name="T423">）</text:span></text:p>
          </table:table-cell>
          <table:table-cell table:style-name="表格29.A2" office:value-type="string">
            <text:p text:style-name="P25" loext:marker-style-name="T78"><text:span text:style-name="T138">Ethernet</text:span><text:span text:style-name="T77">（有線網路）、</text:span><text:span text:style-name="T301">ARP</text:span><text:span text:style-name="T307">（</text:span><text:span text:style-name="T301">IP → MAC</text:span><text:span text:style-name="T307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9"><text:span text:style-name="T199">OSPF </text:span><text:span text:style-name="T194">分層備註：</text:span><text:span text:style-name="T148">OSPF </text:span><text:span text:style-name="T99">在 </text:span><text:span text:style-name="T148">OSI </text:span><text:span text:style-name="T99">模型屬第 </text:span><text:span text:style-name="T148">3 </text:span><text:span text:style-name="T99">層（</text:span><text:span text:style-name="T148">Network</text:span><text:span text:style-name="T99">）；但在 </text:span><text:span text:style-name="T148">TCP/IP </text:span><text:span text:style-name="T99">模型中，因為它直接跑在 </text:span><text:span text:style-name="T148">IP </text:span><text:span text:style-name="T99">上（不透過 </text:span><text:span text:style-name="T148">TCP/UDP</text:span><text:span text:style-name="T99">），通常歸為 </text:span><text:span text:style-name="T148">Application </text:span><text:span text:style-name="T99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6" loext:marker-style-name="T71"><text:span text:style-name="T70">協定</text:span><text:span text:style-name="T71"/></text:p>
            </table:table-cell>
            <table:table-cell table:style-name="表格30.A1" office:value-type="string">
              <text:p text:style-name="P6" loext:marker-style-name="T71"><text:span text:style-name="T70">層級</text:span><text:span text:style-name="T71"/></text:p>
            </table:table-cell>
            <table:table-cell table:style-name="表格30.A1" office:value-type="string">
              <text:p text:style-name="P6" loext:marker-style-name="T71"><text:span text:style-name="T70">做什麼（白話）</text:span><text:span text:style-name="T71"/></text:p>
            </table:table-cell>
            <table:table-cell table:style-name="表格30.A1" office:value-type="string">
              <text:p text:style-name="P6" loext:marker-style-name="T71"><text:span text:style-name="T70">生活比喻</text:span><text:span text:style-name="T71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5" loext:marker-style-name="T129"><text:span text:style-name="T169">DHCP</text:span><text:span text:style-name="T170"> Dynamic Host Configuration Protocol</text:span></text:p>
          </table:table-cell>
          <table:table-cell table:style-name="表格30.A2" office:value-type="string">
            <text:p text:style-name="P25" loext:marker-style-name="T129"><text:span text:style-name="T130">應用層</text:span><text:span text:style-name="T129"/></text:p>
          </table:table-cell>
          <table:table-cell table:style-name="表格30.A2" office:value-type="string">
            <text:p text:style-name="P25" loext:marker-style-name="T129"><text:span text:style-name="T131">連上 </text:span><text:span text:style-name="T171">WiFi </text:span><text:span text:style-name="T131">時不必手動設定 </text:span><text:span text:style-name="T171">IP</text:span><text:span text:style-name="T130">，</text:span><text:span text:style-name="T170">DHCP </text:span><text:span text:style-name="T130">伺服器</text:span><text:span text:style-name="T310">自動分配一個 </text:span><text:span text:style-name="T322">IP </text:span><text:span text:style-name="T310">給你</text:span><text:span text:style-name="T130">。</text:span></text:p>
          </table:table-cell>
          <table:table-cell table:style-name="表格30.A2" office:value-type="string">
            <text:p text:style-name="P25" loext:marker-style-name="T129"><text:span text:style-name="T130">進飯店前台自動安排房號</text:span><text:span text:style-name="T129"/></text:p>
          </table:table-cell>
        </table:table-row>
        <table:table-row table:style-name="表格30.1">
          <table:table-cell table:style-name="表格30.A3" office:value-type="string">
            <text:p text:style-name="P25" loext:marker-style-name="T129"><text:span text:style-name="T169">SSH</text:span><text:span text:style-name="T170"> Secure Shell</text:span></text:p>
          </table:table-cell>
          <table:table-cell table:style-name="表格30.A3" office:value-type="string">
            <text:p text:style-name="P25" loext:marker-style-name="T129"><text:span text:style-name="T130">應用層</text:span><text:span text:style-name="T129"/></text:p>
          </table:table-cell>
          <table:table-cell table:style-name="表格30.A3" office:value-type="string">
            <text:p text:style-name="P25" loext:marker-style-name="T129"><text:span text:style-name="T405">透過加密通道遠端操控</text:span><text:span text:style-name="T130">另一台 </text:span><text:span text:style-name="T170">Linux</text:span><text:span text:style-name="T130">／伺服器的終端機。</text:span></text:p>
          </table:table-cell>
          <table:table-cell table:style-name="表格30.A3" office:value-type="string">
            <text:p text:style-name="P25" loext:marker-style-name="T129"><text:span text:style-name="T130">加密版的遠端遙控器</text:span><text:span text:style-name="T129"/></text:p>
          </table:table-cell>
        </table:table-row>
        <table:table-row table:style-name="表格30.1">
          <table:table-cell table:style-name="表格30.A2" office:value-type="string">
            <text:p text:style-name="P25" loext:marker-style-name="T129"><text:span text:style-name="T169">MQTT</text:span><text:span text:style-name="T170"> Message Queuing Telemetry Transport</text:span></text:p>
          </table:table-cell>
          <table:table-cell table:style-name="表格30.A2" office:value-type="string">
            <text:p text:style-name="P25" loext:marker-style-name="T129"><text:span text:style-name="T130">應用層</text:span><text:span text:style-name="T129"/></text:p>
          </table:table-cell>
          <table:table-cell table:style-name="表格30.A2" office:value-type="string">
            <text:p text:style-name="P25" loext:marker-style-name="T129"><text:span text:style-name="T384">IoT </text:span><text:span text:style-name="T368">裝置常用的輕量傳訊協定</text:span><text:span text:style-name="T130">，採</text:span><text:span text:style-name="T432">「發布／訂閱」模式</text:span><text:span text:style-name="T130">，非常省流量。</text:span></text:p>
          </table:table-cell>
          <table:table-cell table:style-name="表格30.A2" office:value-type="string">
            <text:p text:style-name="P25" loext:marker-style-name="T129"><text:span text:style-name="T130">溫度感測器發布「</text:span><text:span text:style-name="T170">30°C</text:span><text:span text:style-name="T130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5" loext:marker-style-name="T129"><text:span text:style-name="T169">OSPF</text:span><text:span text:style-name="T170"> Open Shortest Path First</text:span></text:p>
          </table:table-cell>
          <table:table-cell table:style-name="表格30.A3" office:value-type="string">
            <text:p text:style-name="P25" loext:marker-style-name="T129"><text:span text:style-name="T130">視模型而定 ⚠️</text:span><text:span text:style-name="T129"/></text:p>
          </table:table-cell>
          <table:table-cell table:style-name="表格30.A3" office:value-type="string">
            <text:p text:style-name="P25" loext:marker-style-name="T129"><text:span text:style-name="T259">路由器之間使用</text:span><text:span text:style-name="T130">，</text:span><text:span text:style-name="T311">自動計算封包走哪條路徑最短、最快</text:span><text:span text:style-name="T130">。</text:span></text:p>
          </table:table-cell>
          <table:table-cell table:style-name="表格30.A3" office:value-type="string">
            <text:p text:style-name="P25" loext:marker-style-name="T129"><text:span text:style-name="T170">Google Maps </text:span><text:span text:style-name="T130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8"><text:span text:style-name="T176">💡 <text:s/></text:span><text:span text:style-name="T180">快速判斷層級的技巧</text:span></text:p>
            <text:p text:style-name="P9"><text:span text:style-name="T183">使用者／應用服務</text:span><text:span text:style-name="T99">（</text:span><text:span text:style-name="T148">SSH</text:span><text:span text:style-name="T99">、</text:span><text:span text:style-name="T148">DHCP</text:span><text:span text:style-name="T99">、</text:span><text:span text:style-name="T148">MQTT</text:span><text:span text:style-name="T99">、</text:span><text:span text:style-name="T148">HTTP</text:span><text:span text:style-name="T99">）→ 幾乎都是應用層。</text:span></text:p>
            <text:p text:style-name="P10"><text:span text:style-name="T183">幫路由器決定走哪條路</text:span><text:span text:style-name="T99">（</text:span><text:span text:style-name="T148">OSPF</text:span><text:span text:style-name="T99">、</text:span><text:span text:style-name="T148">RIP</text:span><text:span text:style-name="T99">、</text:span><text:span text:style-name="T148">BGP</text:span><text:span text:style-name="T99">）→ 在 </text:span><text:span text:style-name="T148">OSI </text:span><text:span text:style-name="T99">屬網路層，</text:span><text:span text:style-name="T148">TCP/IP </text:span><text:span text:style-name="T99">多歸應用層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五、網路層深度解析：</text:span><text:span text:style-name="T27">IP · Routing · ICMP</text:span></text:h>
      <text:p text:style-name="P32" loext:marker-style-name="T101"><text:span text:style-name="T99">網路層（第 </text:span><text:span text:style-name="T148">3 </text:span><text:span text:style-name="T99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2" loext:marker-style-name="T65"><text:span text:style-name="T74">📍 IP</text:span><text:span text:style-name="T64">（位址）</text:span></text:p>
            </table:table-cell>
            <table:table-cell table:style-name="表格31.A1" office:value-type="string">
              <text:p text:style-name="P22" loext:marker-style-name="T65"><text:span text:style-name="T74">🗺️ Routing</text:span><text:span text:style-name="T64">（路由）</text:span></text:p>
            </table:table-cell>
            <table:table-cell table:style-name="表格31.A1" office:value-type="string">
              <text:p text:style-name="P22" loext:marker-style-name="T65"><text:span text:style-name="T74">🚨 ICMP</text:span><text:span text:style-name="T64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5" loext:marker-style-name="T78"><text:span text:style-name="T86">決定「目的地在哪」</text:span><text:span text:style-name="T77">。每台設備都有 </text:span><text:span text:style-name="T138">IP</text:span><text:span text:style-name="T77">，就像門牌；</text:span><text:span text:style-name="T138">IP </text:span><text:span text:style-name="T77">負責標記「我要送去哪裡」。</text:span></text:p>
          </table:table-cell>
          <table:table-cell table:style-name="表格31.A2" office:value-type="string">
            <text:p text:style-name="P25" loext:marker-style-name="T78"><text:span text:style-name="T86">決定「怎麼走最快」</text:span><text:span text:style-name="T77">。</text:span><text:span text:style-name="T90">封包經過很多路由器</text:span><text:span text:style-name="T77">，</text:span><text:span text:style-name="T399">每台都問「下一站往哪送？」</text:span><text:span text:style-name="T241">OSPF </text:span><text:span text:style-name="T251">等協定算出最短路徑。</text:span></text:p>
          </table:table-cell>
          <table:table-cell table:style-name="表格31.A2" office:value-type="string">
            <text:p text:style-name="P25" loext:marker-style-name="T78"><text:span text:style-name="T86">回報「出了什麼問題」</text:span><text:span text:style-name="T77">。找不到主機、路不通、</text:span><text:span text:style-name="T138">TTL </text:span><text:span text:style-name="T77">歸零 → </text:span><text:span text:style-name="T304">各自回傳對應 </text:span><text:span text:style-name="T299">ICMP </text:span><text:span text:style-name="T304">訊息</text:span><text:span text:style-name="T77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8"><text:span text:style-name="T176">🔍 <text:s/></text:span><text:span text:style-name="T58">ping </text:span><text:span text:style-name="T47">是什麼？為什麼跟 </text:span><text:span text:style-name="T58">ICMP </text:span><text:span text:style-name="T47">有關？</text:span></text:p>
            <text:p text:style-name="P9" loext:marker-style-name="T52"><text:span text:style-name="T59">ping google.com </text:span><text:span text:style-name="T50">的運作</text:span><text:span text:style-name="T51">：</text:span></text:p>
            <text:p text:style-name="P10" loext:marker-style-name="T101"><text:span text:style-name="T148">① </text:span><text:span text:style-name="T99">你的電腦發出 </text:span><text:span text:style-name="T158">ICMP Echo Request</text:span><text:span text:style-name="T99">（「你在嗎？」）</text:span></text:p>
            <text:p text:style-name="P10" loext:marker-style-name="T101"><text:span text:style-name="T148">② </text:span><text:span text:style-name="T99">目標主機回傳 </text:span><text:span text:style-name="T158">ICMP Echo Reply</text:span><text:span text:style-name="T99">（「我在！」）</text:span></text:p>
            <text:p text:style-name="P10" loext:marker-style-name="T101"><text:span text:style-name="T148">③ </text:span><text:span text:style-name="T334">顯示來回時間（</text:span><text:span text:style-name="T341">ms</text:span><text:span text:style-name="T334">），數字越小代表網路越暢通</text:span></text:p>
            <text:p text:style-name="P10"><text:span text:style-name="T199">⚠️ </text:span><text:span text:style-name="T194">重點：</text:span><text:span text:style-name="T324">ping </text:span><text:span text:style-name="T313">完全使用 </text:span><text:span text:style-name="T324">ICMP</text:span><text:span text:style-name="T313">，不走 </text:span><text:span text:style-name="T324">TCP </text:span><text:span text:style-name="T313">也不走 </text:span><text:span text:style-name="T324">UDP</text:span><text:span text:style-name="T9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8"><text:span text:style-name="T176">⚡ <text:s/></text:span><text:span text:style-name="T180">三個概念一次記清楚</text:span></text:p>
            <text:p text:style-name="P9"><text:span text:style-name="T191">📍 IP → </text:span><text:span text:style-name="T99">定位（目的地是誰）　</text:span><text:span text:style-name="T183">🗺️ </text:span><text:span text:style-name="T191">Routing → </text:span><text:span text:style-name="T406">選路（怎麼走最快）</text:span><text:span text:style-name="T99">　</text:span><text:span text:style-name="T183">🚨 </text:span><text:span text:style-name="T192">ICMP → </text:span><text:span text:style-name="T313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28">六、</text:span><text:span text:style-name="T27">TCP vs UDP </text:span><text:span text:style-name="T28">差異比較</text:span></text:h>
      <text:p text:style-name="P32" loext:marker-style-name="T101"><text:span text:style-name="T99">傳輸層最核心的兩個協定，差異在於「是否保證送達」（更深入的擁塞控制見第五篇）。</text:span><text:span text:style-name="T10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6" loext:marker-style-name="T69"><text:span text:style-name="T68">比較項目</text:span><text:span text:style-name="T69"/></text:p>
            </table:table-cell>
            <table:table-cell table:style-name="表格32.A1" office:value-type="string">
              <text:p text:style-name="P6" loext:marker-style-name="T69"><text:span text:style-name="T75">TCP</text:span><text:span text:style-name="T69"/></text:p>
            </table:table-cell>
            <table:table-cell table:style-name="表格32.A1" office:value-type="string">
              <text:p text:style-name="P6" loext:marker-style-name="T69"><text:span text:style-name="T75">UDP</text:span><text:span text:style-name="T69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5" loext:marker-style-name="T125"><text:span text:style-name="T124">連線方式</text:span><text:span text:style-name="T125"/></text:p>
          </table:table-cell>
          <table:table-cell table:style-name="表格32.A2" office:value-type="string">
            <text:p text:style-name="P25" loext:marker-style-name="T125"><text:span text:style-name="T124">需要握手（三向交握）</text:span><text:span text:style-name="T125"/></text:p>
          </table:table-cell>
          <table:table-cell table:style-name="表格32.A2" office:value-type="string">
            <text:p text:style-name="P25" loext:marker-style-name="T125"><text:span text:style-name="T124">無連線，直接送出</text:span><text:span text:style-name="T125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125"><text:span text:style-name="T124">可靠性</text:span><text:span text:style-name="T125"/></text:p>
          </table:table-cell>
          <table:table-cell table:style-name="表格32.A3" office:value-type="string">
            <text:p text:style-name="P25" loext:marker-style-name="T264"><text:span text:style-name="T263">保證送達，遺失會重傳</text:span><text:span text:style-name="T264"/></text:p>
          </table:table-cell>
          <table:table-cell table:style-name="表格32.A3" office:value-type="string">
            <text:p text:style-name="P25" loext:marker-style-name="T373"><text:span text:style-name="T372">不保證，遺失不補</text:span><text:span text:style-name="T373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125"><text:span text:style-name="T124">速度</text:span><text:span text:style-name="T125"/></text:p>
          </table:table-cell>
          <table:table-cell table:style-name="表格32.A2" office:value-type="string">
            <text:p text:style-name="P25" loext:marker-style-name="T127"><text:span text:style-name="T126">較慢（有確認機制）</text:span><text:span text:style-name="T127"/></text:p>
          </table:table-cell>
          <table:table-cell table:style-name="表格32.A2" office:value-type="string">
            <text:p text:style-name="P25" loext:marker-style-name="T127"><text:span text:style-name="T126">較快（無確認機制）</text:span><text:span text:style-name="T127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125"><text:span text:style-name="T124">使用情境</text:span><text:span text:style-name="T125"/></text:p>
          </table:table-cell>
          <table:table-cell table:style-name="表格32.A3" office:value-type="string">
            <text:p text:style-name="P25" loext:marker-style-name="T125"><text:span text:style-name="T167">HTTP</text:span><text:span text:style-name="T124">、</text:span><text:span text:style-name="T167">Email</text:span><text:span text:style-name="T124">、</text:span><text:span text:style-name="T167">FTP</text:span></text:p>
          </table:table-cell>
          <table:table-cell table:style-name="表格32.A3" office:value-type="string">
            <text:p text:style-name="P25" loext:marker-style-name="T125"><text:span text:style-name="T124">串流影音、</text:span><text:span text:style-name="T167">VoIP</text:span><text:span text:style-name="T124">、</text:span><text:span text:style-name="T167">DNS</text:span></text:p>
          </table:table-cell>
        </table:table-row>
        <table:table-row table:style-name="表格32.1">
          <table:table-cell table:style-name="表格32.A2" office:value-type="string">
            <text:p text:style-name="P25" loext:marker-style-name="T125"><text:span text:style-name="T124">一句話</text:span><text:span text:style-name="T125"/></text:p>
          </table:table-cell>
          <table:table-cell table:style-name="表格32.A2" office:value-type="string">
            <text:p text:style-name="P25" loext:marker-style-name="T189"><text:span text:style-name="T188">「穩定優先」</text:span><text:span text:style-name="T189"/></text:p>
          </table:table-cell>
          <table:table-cell table:style-name="表格32.A2" office:value-type="string">
            <text:p text:style-name="P25" loext:marker-style-name="T36"><text:span text:style-name="T35">「速度優先」</text:span><text:span text:style-name="T36"/></text:p>
          </table:table-cell>
        </table:table-row>
      </table:table>
      <text:h text:style-name="P2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><text:span text:style-name="T176">🔗 <text:s/></text:span><text:span text:style-name="T58">ARP </text:span><text:span text:style-name="T47">重點</text:span></text:p>
            <text:p text:style-name="P9"><text:span text:style-name="T60">ARP </text:span><text:span text:style-name="T51">做什麼？　</text:span><text:span text:style-name="T115">在</text:span><text:span text:style-name="T429">同一個</text:span><text:span text:style-name="T115">區域網路（</text:span><text:span text:style-name="T158">LAN</text:span><text:span text:style-name="T115">）中</text:span><text:span text:style-name="T99">，</text:span><text:span text:style-name="T335">將「</text:span><text:span text:style-name="T342">IP </text:span><text:span text:style-name="T335">位址（邏輯位址）」轉換成「</text:span><text:span text:style-name="T342">MAC </text:span><text:span text:style-name="T335">位址（實體位址）」</text:span><text:span text:style-name="T99">。</text:span></text:p>
            <text:p text:style-name="P10"><text:span text:style-name="T51">為何屬於 </text:span><text:span text:style-name="T60">Link </text:span><text:span text:style-name="T51">層？　</text:span><text:span text:style-name="T324">ARP </text:span><text:span text:style-name="T313">的作用範圍僅限於同一區域網路內，</text:span><text:span text:style-name="T430">無法跨越路由器</text:span><text:span text:style-name="T99">，因此歸屬 </text:span><text:span text:style-name="T148">Link</text:span><text:span text:style-name="T99">（連結）層。</text:span></text:p>
            <text:p text:style-name="P10" loext:marker-style-name="T52"><text:span text:style-name="T51">運作流程：</text:span><text:span text:style-name="T52"/></text:p>
            <text:p text:style-name="P10" loext:marker-style-name="T101"><text:span text:style-name="T148">① </text:span><text:span text:style-name="T119">裝置 </text:span><text:span text:style-name="T162">A </text:span><text:span text:style-name="T119">廣播詢問：</text:span><text:span text:style-name="T99">「</text:span><text:span text:style-name="T115">誰的 </text:span><text:span text:style-name="T158">IP</text:span><text:span text:style-name="T148"> </text:span><text:span text:style-name="T99">是 </text:span><text:span text:style-name="T148">192.168.1.5</text:span><text:span text:style-name="T99">？」</text:span></text:p>
            <text:p text:style-name="P10" loext:marker-style-name="T101"><text:span text:style-name="T148">② </text:span><text:span text:style-name="T120">裝置 </text:span><text:span text:style-name="T163">B </text:span><text:span text:style-name="T120">回應：</text:span><text:span text:style-name="T99">「</text:span><text:span text:style-name="T117">是我！</text:span><text:span text:style-name="T160">MAC </text:span><text:span text:style-name="T117">是</text:span><text:span text:style-name="T99"> </text:span><text:span text:style-name="T148">AA:BB:CC:DD:EE:FF</text:span><text:span text:style-name="T99">」</text:span></text:p>
            <text:p text:style-name="P10" loext:marker-style-name="T101"><text:span text:style-name="T148">③ </text:span><text:span text:style-name="T99">裝置 </text:span><text:span text:style-name="T148">A </text:span><text:span text:style-name="T99">記錄此對應至 </text:span><text:span text:style-name="T148">ARP </text:span><text:span text:style-name="T99">快取，下次直接使用</text:span></text:p>
          </table:table-cell>
        </table:table-row>
      </table:table>
      <text:p text:style-name="P32" loext:marker-style-name="T7"><text:span text:style-name="T6">（</text:span><text:span text:style-name="T16">ARP </text:span><text:span text:style-name="T6">完整流程、</text:span><text:span text:style-name="T16">ARP Spoofing </text:span><text:span text:style-name="T6">與完整上網流程，詳見第四篇。）</text:span></text:p>
      <text:h text:style-name="P2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9"><text:span text:style-name="T24">目的：</text:span><text:span text:style-name="T471">找出封包從來源到目的地</text:span><text:span text:style-name="T238">，</text:span><text:span text:style-name="T475">中間經過哪些路由器</text:span><text:span text:style-name="T99">（完整路徑偵測）。</text:span></text:p>
            <text:p text:style-name="P10"><text:span text:style-name="T476">TTL</text:span><text:span text:style-name="T481">（</text:span><text:span text:style-name="T476">Time To Live</text:span><text:span text:style-name="T481">）</text:span><text:span text:style-name="T24">：</text:span><text:span text:style-name="T334">封包的「存活計數器」。每經過一個路由器就減 </text:span><text:span text:style-name="T341">1</text:span><text:span text:style-name="T99">；</text:span><text:span text:style-name="T265">歸零時路由器丟棄封包</text:span><text:span text:style-name="T99">，並</text:span><text:span text:style-name="T374">回傳 </text:span><text:span text:style-name="T386">ICMP Time Exceeded </text:span><text:span text:style-name="T374">給發送方</text:span><text:span text:style-name="T9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6" loext:marker-style-name="T71"><text:span text:style-name="T70">封包次數</text:span><text:span text:style-name="T71"/></text:p>
          </table:table-cell>
          <table:table-cell table:style-name="表格34.A2" office:value-type="string">
            <text:p text:style-name="P6" loext:marker-style-name="T71"><text:span text:style-name="T76">TTL </text:span><text:span text:style-name="T70">值</text:span></text:p>
          </table:table-cell>
          <table:table-cell table:style-name="表格34.A2" office:value-type="string">
            <text:p text:style-name="P6" loext:marker-style-name="T71"><text:span text:style-name="T70">發生什麼事</text:span><text:span text:style-name="T71"/></text:p>
          </table:table-cell>
          <table:table-cell table:style-name="表格34.A2" office:value-type="string">
            <text:p text:style-name="P6" loext:marker-style-name="T71"><text:span text:style-name="T70">取得資訊</text:span><text:span text:style-name="T71"/></text:p>
          </table:table-cell>
        </table:table-row>
        <table:table-row table:style-name="表格34.1">
          <table:table-cell table:style-name="表格34.A3" office:value-type="string">
            <text:p text:style-name="P25" loext:marker-style-name="T129"><text:span text:style-name="T130">第 </text:span><text:span text:style-name="T170">1 </text:span><text:span text:style-name="T130">次</text:span></text:p>
          </table:table-cell>
          <table:table-cell table:style-name="表格34.A3" office:value-type="string">
            <text:p text:style-name="P25" loext:marker-style-name="T129"><text:span text:style-name="T170">TTL = 1</text:span><text:span text:style-name="T129"/></text:p>
          </table:table-cell>
          <table:table-cell table:style-name="表格34.A3" office:value-type="string">
            <text:p text:style-name="P25" loext:marker-style-name="T129"><text:span text:style-name="T133">抵達第 </text:span><text:span text:style-name="T172">1 </text:span><text:span text:style-name="T133">個 </text:span><text:span text:style-name="T172">Router </text:span><text:span text:style-name="T170">→ TTL </text:span><text:span text:style-name="T130">歸零 → 回傳 </text:span><text:span text:style-name="T170">ICMP Time Exceeded</text:span></text:p>
          </table:table-cell>
          <table:table-cell table:style-name="表格34.A3" office:value-type="string">
            <text:p text:style-name="P25" loext:marker-style-name="T132"><text:span text:style-name="T131">得知第 </text:span><text:span text:style-name="T171">1 </text:span><text:span text:style-name="T131">站位置</text:span></text:p>
          </table:table-cell>
        </table:table-row>
        <table:table-row table:style-name="表格34.1">
          <table:table-cell table:style-name="表格34.A4" office:value-type="string">
            <text:p text:style-name="P25" loext:marker-style-name="T129"><text:span text:style-name="T130">第 </text:span><text:span text:style-name="T170">2 </text:span><text:span text:style-name="T130">次</text:span></text:p>
          </table:table-cell>
          <table:table-cell table:style-name="表格34.A4" office:value-type="string">
            <text:p text:style-name="P25" loext:marker-style-name="T129"><text:span text:style-name="T170">TTL = 2</text:span><text:span text:style-name="T129"/></text:p>
          </table:table-cell>
          <table:table-cell table:style-name="表格34.A4" office:value-type="string">
            <text:p text:style-name="P25" loext:marker-style-name="T129"><text:span text:style-name="T133">通過第 </text:span><text:span text:style-name="T172">1 </text:span><text:span text:style-name="T133">站 → 抵達第 </text:span><text:span text:style-name="T172">2 </text:span><text:span text:style-name="T133">個 </text:span><text:span text:style-name="T172">Router</text:span><text:span text:style-name="T170"> → TTL </text:span><text:span text:style-name="T130">歸零 → 回傳 </text:span><text:span text:style-name="T170">ICMP</text:span></text:p>
          </table:table-cell>
          <table:table-cell table:style-name="表格34.A4" office:value-type="string">
            <text:p text:style-name="P25" loext:marker-style-name="T132"><text:span text:style-name="T131">得知第 </text:span><text:span text:style-name="T171">2 </text:span><text:span text:style-name="T131">站位置</text:span></text:p>
          </table:table-cell>
        </table:table-row>
        <table:table-row table:style-name="表格34.1">
          <table:table-cell table:style-name="表格34.A3" office:value-type="string">
            <text:p text:style-name="P25" loext:marker-style-name="T129"><text:span text:style-name="T130">第 </text:span><text:span text:style-name="T170">N </text:span><text:span text:style-name="T130">次</text:span></text:p>
          </table:table-cell>
          <table:table-cell table:style-name="表格34.A3" office:value-type="string">
            <text:p text:style-name="P25" loext:marker-style-name="T129"><text:span text:style-name="T170">TTL = N</text:span><text:span text:style-name="T129"/></text:p>
          </table:table-cell>
          <table:table-cell table:style-name="表格34.A3" office:value-type="string">
            <text:p text:style-name="P25" loext:marker-style-name="T129"><text:span text:style-name="T130">以此類推，每次多走一站</text:span><text:span text:style-name="T129"/></text:p>
          </table:table-cell>
          <table:table-cell table:style-name="表格34.A3" office:value-type="string">
            <text:p text:style-name="P25" loext:marker-style-name="T129"><text:span text:style-name="T130">逐步還原完整路徑</text:span><text:span text:style-name="T129"/></text:p>
          </table:table-cell>
        </table:table-row>
        <table:table-row table:style-name="表格34.1">
          <table:table-cell table:style-name="表格34.A4" office:value-type="string">
            <text:p text:style-name="P25" loext:marker-style-name="T129"><text:span text:style-name="T130">最後</text:span><text:span text:style-name="T129"/></text:p>
          </table:table-cell>
          <table:table-cell table:style-name="表格34.A4" office:value-type="string">
            <text:p text:style-name="P25" loext:marker-style-name="T129"><text:span text:style-name="T170">TTL = </text:span><text:span text:style-name="T130">距離</text:span></text:p>
          </table:table-cell>
          <table:table-cell table:style-name="表格34.A4" office:value-type="string">
            <text:p text:style-name="P25" loext:marker-style-name="T129"><text:span text:style-name="T130">封包抵達目的地，回傳正常應答</text:span><text:span text:style-name="T129"/></text:p>
          </table:table-cell>
          <table:table-cell table:style-name="表格34.A4" office:value-type="string">
            <text:p text:style-name="P25" loext:marker-style-name="T129"><text:span text:style-name="T130">路徑偵測完成 ✓</text:span><text:span text:style-name="T129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8"><text:span text:style-name="T176">⚡ <text:s/></text:span><text:span text:style-name="T180">一句話記憶</text:span></text:p>
            <text:p text:style-name="P9" loext:marker-style-name="T101"><text:span text:style-name="T324">Traceroute = TTL </text:span><text:span text:style-name="T313">遞增 ＋ </text:span><text:span text:style-name="T324">ICMP </text:span><text:span text:style-name="T313">回報</text:span><text:span text:style-name="T99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><text:span text:style-name="T176">🔥 <text:s/></text:span><text:span text:style-name="T232">TCP/IP </text:span><text:span text:style-name="T226">四層心法（背這個就夠）</text:span></text:p>
            <text:p text:style-name="P9"><text:span text:style-name="T233">🟢 Application</text:span><text:span text:style-name="T227">（應用層） → </text:span><text:span text:style-name="T99">給人用（</text:span><text:span text:style-name="T148">HTTP</text:span><text:span text:style-name="T99">、</text:span><text:span text:style-name="T148">DNS</text:span><text:span text:style-name="T99">、</text:span><text:span text:style-name="T148">DHCP</text:span><text:span text:style-name="T99">、</text:span><text:span text:style-name="T148">SSH</text:span><text:span text:style-name="T99">、</text:span><text:span text:style-name="T148">MQTT</text:span><text:span text:style-name="T99">）</text:span></text:p>
            <text:p text:style-name="P10"><text:soft-page-break/><text:span text:style-name="T233">🟡 Transport</text:span><text:span text:style-name="T227">（傳輸層） → </text:span><text:span text:style-name="T99">怎麼送（</text:span><text:span text:style-name="T148">TCP</text:span><text:span text:style-name="T99">＝穩定 </text:span><text:span text:style-name="T148">/ UDP</text:span><text:span text:style-name="T99">＝快速）</text:span><text:span text:style-name="T148">(</text:span><text:span text:style-name="T236">切分、編頁碼、確認收件</text:span><text:span text:style-name="T148">)</text:span></text:p>
            <text:p text:style-name="P10"><text:span text:style-name="T233">🔵 Network</text:span><text:span text:style-name="T227">（網路層） → </text:span><text:span text:style-name="T99">走哪條路（</text:span><text:span text:style-name="T148">IP</text:span><text:span text:style-name="T99">、</text:span><text:span text:style-name="T148">ICMP</text:span><text:span text:style-name="T99">）</text:span></text:p>
            <text:p text:style-name="P10"><text:span text:style-name="T233">🟠 Link</text:span><text:span text:style-name="T227">（連結層） → </text:span><text:span text:style-name="T99">同一區網怎麼接（</text:span><text:span text:style-name="T148">Ethernet</text:span><text:span text:style-name="T99">、</text:span><text:span text:style-name="T148">ARP</text:span><text:span text:style-name="T99">）</text:span><text:span text:style-name="T148">(</text:span><text:span text:style-name="T59">ARP</text:span><text:span text:style-name="T60"> </text:span><text:span text:style-name="T51">：</text:span><text:span text:style-name="T115">在</text:span><text:span text:style-name="T429">同一個</text:span><text:span text:style-name="T115">區域網路（</text:span><text:span text:style-name="T158">LAN</text:span><text:span text:style-name="T115">）中</text:span><text:span text:style-name="T99">，</text:span><text:span text:style-name="T335">將「</text:span><text:span text:style-name="T342">IP </text:span><text:span text:style-name="T335">位址（邏輯位址）」轉換成「</text:span><text:span text:style-name="T342">MAC </text:span><text:span text:style-name="T335">位址（實體位址）」</text:span><text:span text:style-name="T148">)</text:span></text:p>
          </table:table-cell>
        </table:table-row>
      </table:table>
      <text:h text:style-name="P13" text:outline-level="1" loext:marker-style-name="T67"><text:span text:style-name="T66">第 二 篇　</text:span><text:span text:style-name="T67">IP </text:span><text:span text:style-name="T66">位址與封包處理：分類 </text:span><text:span text:style-name="T67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"><text:span text:style-name="T176">📐 <text:s/></text:span><text:span text:style-name="T47">本篇重點</text:span></text:p>
            <text:p text:style-name="P9" loext:marker-style-name="T101"><text:span text:style-name="T99">本篇分兩大主軸：前半談「</text:span><text:span text:style-name="T160">IP </text:span><text:span text:style-name="T117">位址如何劃分</text:span><text:span text:style-name="T99">」（分類、</text:span><text:span text:style-name="T148">CIDR</text:span><text:span text:style-name="T99">、子網計算、</text:span><text:span text:style-name="T148">VLSM</text:span><text:span text:style-name="T99">、</text:span><text:span text:style-name="T148">CIDR </text:span><text:span text:style-name="T99">合併）；後半談「</text:span><text:span text:style-name="T117">封包如何被切割傳送</text:span><text:span text:style-name="T99">」（</text:span><text:span text:style-name="T148">MTU</text:span><text:span text:style-name="T99">、</text:span><text:span text:style-name="T148">Fragmentation</text:span><text:span text:style-name="T99">、</text:span><text:span text:style-name="T148">IP Header</text:span><text:span text:style-name="T99">、</text:span><text:span text:style-name="T148">DF/MF</text:span><text:span text:style-name="T99">、</text:span><text:span text:style-name="T148">PMTUD</text:span><text:span text:style-name="T99">、</text:span><text:span text:style-name="T148">MSS</text:span><text:span text:style-name="T99">、</text:span><text:span text:style-name="T148">Frag DoS</text:span><text:span text:style-name="T99">）。子網計算是計算題必考，務必動手練。</text:span></text:p>
          </table:table-cell>
        </table:table-row>
      </table:table>
      <text:h text:style-name="P2" text:outline-level="2" loext:marker-style-name="T27"><text:span text:style-name="T28">壹、</text:span><text:span text:style-name="T27">IP </text:span><text:span text:style-name="T28">位址基礎</text:span></text:h>
      <text:p text:style-name="P32" loext:marker-style-name="T101"><text:span text:style-name="T158">IP </text:span><text:span text:style-name="T115">位址（</text:span><text:span text:style-name="T158">IPv4</text:span><text:span text:style-name="T115">）是</text:span><text:span text:style-name="T266">一組 </text:span><text:span text:style-name="T283">32 </text:span><text:span text:style-name="T266">個 </text:span><text:span text:style-name="T283">bit</text:span><text:span text:style-name="T99">，用來</text:span><text:span text:style-name="T407">識別網路上每一台設備的「地址」</text:span><text:span text:style-name="T99">。</text:span><text:span text:style-name="T115">為了人類方便閱讀</text:span><text:span text:style-name="T99">，</text:span><text:span text:style-name="T117">這 </text:span><text:span text:style-name="T160">32 </text:span><text:span text:style-name="T117">個 </text:span><text:span text:style-name="T160">bit </text:span><text:span text:style-name="T117">被分成 </text:span><text:span text:style-name="T160">4 </text:span><text:span text:style-name="T117">組</text:span><text:span text:style-name="T99">、</text:span><text:span text:style-name="T313">每組 </text:span><text:span text:style-name="T324">8 </text:span><text:span text:style-name="T313">個 </text:span><text:span text:style-name="T324">bit</text:span><text:span text:style-name="T313">（一個 </text:span><text:span text:style-name="T324">Octet</text:span><text:span text:style-name="T313">），再轉成十進位</text:span><text:span text:style-name="T99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2" loext:marker-style-name="T69"><text:span text:style-name="T75">Octet 1</text:span><text:span text:style-name="T69"/></text:p>
            </table:table-cell>
            <table:table-cell table:style-name="表格37.A1" office:value-type="string">
              <text:p text:style-name="P22" loext:marker-style-name="T69"><text:span text:style-name="T75">Octet 2</text:span><text:span text:style-name="T69"/></text:p>
            </table:table-cell>
            <table:table-cell table:style-name="表格37.A1" office:value-type="string">
              <text:p text:style-name="P22" loext:marker-style-name="T69"><text:span text:style-name="T75">Octet 3</text:span><text:span text:style-name="T69"/></text:p>
            </table:table-cell>
            <table:table-cell table:style-name="表格37.A1" office:value-type="string">
              <text:p text:style-name="P22" loext:marker-style-name="T69"><text:span text:style-name="T75">Octet 4</text:span><text:span text:style-name="T69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5" loext:marker-style-name="T125"><text:span text:style-name="T167">192</text:span><text:span text:style-name="T125"/></text:p>
          </table:table-cell>
          <table:table-cell table:style-name="表格37.A2" office:value-type="string">
            <text:p text:style-name="P25" loext:marker-style-name="T125"><text:span text:style-name="T167">168</text:span><text:span text:style-name="T125"/></text:p>
          </table:table-cell>
          <table:table-cell table:style-name="表格37.A2" office:value-type="string">
            <text:p text:style-name="P25" loext:marker-style-name="T125"><text:span text:style-name="T167">1</text:span><text:span text:style-name="T125"/></text:p>
          </table:table-cell>
          <table:table-cell table:style-name="表格37.A2" office:value-type="string">
            <text:p text:style-name="P25" loext:marker-style-name="T125"><text:span text:style-name="T167">0</text:span><text:span text:style-name="T125"/></text:p>
          </table:table-cell>
        </table:table-row>
      </table:table>
      <text:p text:style-name="P32" loext:marker-style-name="T11"><text:span text:style-name="T20">→ </text:span><text:span text:style-name="T266">總共 </text:span><text:span text:style-name="T283">4 × 8 = 32 </text:span><text:span text:style-name="T266">個 </text:span><text:span text:style-name="T283">bit</text:span><text:span text:style-name="T10">，</text:span><text:span text:style-name="T487">每組數字範圍 </text:span><text:span text:style-name="T488">0</text:span><text:span text:style-name="T487">～</text:span><text:span text:style-name="T488">255</text:span><text:span text:style-name="T10">（因為 </text:span><text:span text:style-name="T488">2⁸ = 256 </text:span><text:span text:style-name="T487">種組合</text:span><text:span text:style-name="T10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><text:span text:style-name="T176">💡 <text:s/></text:span><text:span text:style-name="T198">為什麼 </text:span><text:span text:style-name="T202">IP </text:span><text:span text:style-name="T198">數量一定是 </text:span><text:span text:style-name="T202">2 </text:span><text:span text:style-name="T198">的次方？</text:span></text:p>
            <text:p text:style-name="P9" loext:marker-style-name="T101"><text:span text:style-name="T117">每一個 </text:span><text:span text:style-name="T160">bit </text:span><text:span text:style-name="T117">只有 </text:span><text:span text:style-name="T160">0 </text:span><text:span text:style-name="T117">或 </text:span><text:span text:style-name="T160">1 </text:span><text:span text:style-name="T117">兩種狀態</text:span><text:span text:style-name="T99">。若有 </text:span><text:span text:style-name="T148">n </text:span><text:span text:style-name="T99">個 </text:span><text:span text:style-name="T148">bit </text:span><text:span text:style-name="T99">可自由變化，可能的組合數 ＝ </text:span><text:span text:style-name="T148">2ⁿ</text:span><text:span text:style-name="T99">。</text:span></text:p>
            <text:p text:style-name="P10" loext:marker-style-name="T101"><text:span text:style-name="T99">因此</text:span><text:span text:style-name="T238">子網路的 </text:span><text:span text:style-name="T239">IP </text:span><text:span text:style-name="T238">總數一定是 </text:span><text:span text:style-name="T239">2</text:span><text:span text:style-name="T238">、</text:span><text:span text:style-name="T239">4</text:span><text:span text:style-name="T238">、</text:span><text:span text:style-name="T239">8</text:span><text:span text:style-name="T238">、</text:span><text:span text:style-name="T239">16</text:span><text:span text:style-name="T238">、</text:span><text:span text:style-name="T239">32</text:span><text:span text:style-name="T238">、</text:span><text:span text:style-name="T239">64</text:span><text:span text:style-name="T238">、</text:span><text:span text:style-name="T239">128</text:span><text:span text:style-name="T238">、</text:span><text:span text:style-name="T239">256… </text:span><text:span text:style-name="T238">等 </text:span><text:span text:style-name="T239">2 </text:span><text:span text:style-name="T238">的次方</text:span><text:span text:style-name="T99">，不可能是 </text:span><text:span text:style-name="T148">100 </text:span><text:span text:style-name="T99">或 </text:span><text:span text:style-name="T148">50</text:span><text:span text:style-name="T99">。這就是</text:span><text:span text:style-name="T489">計算子網時必須「找最接近的 </text:span><text:span text:style-name="T507">2ⁿ</text:span><text:span text:style-name="T489">」</text:span><text:span text:style-name="T99">的根本原因。</text:span></text:p>
          </table:table-cell>
        </table:table-row>
      </table:table>
      <text:h text:style-name="P2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6" loext:marker-style-name="T65"><text:span text:style-name="T64">類別</text:span><text:span text:style-name="T65"/></text:p>
            </table:table-cell>
            <table:table-cell table:style-name="表格39.A1" office:value-type="string">
              <text:p text:style-name="P6" loext:marker-style-name="T65"><text:span text:style-name="T64">第一組數字範圍</text:span><text:span text:style-name="T65"/></text:p>
            </table:table-cell>
            <table:table-cell table:style-name="表格39.A1" office:value-type="string">
              <text:p text:style-name="P6" loext:marker-style-name="T65"><text:span text:style-name="T64">預設遮罩</text:span><text:span text:style-name="T65"/></text:p>
            </table:table-cell>
            <table:table-cell table:style-name="表格39.A1" office:value-type="string">
              <text:p text:style-name="P6" loext:marker-style-name="T65"><text:span text:style-name="T64">用途</text:span><text:span text:style-name="T65"/></text:p>
            </table:table-cell>
            <table:table-cell table:style-name="表格39.A1" office:value-type="string">
              <text:p text:style-name="P6" loext:marker-style-name="T65"><text:span text:style-name="T64">每網路主機數</text:span><text:span text:style-name="T65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5" loext:marker-style-name="T78"><text:span text:style-name="T138">A </text:span><text:span text:style-name="T77">類</text:span></text:p>
          </table:table-cell>
          <table:table-cell table:style-name="表格39.A2" office:value-type="string">
            <text:p text:style-name="P25" loext:marker-style-name="T306"><text:span text:style-name="T299">1 </text:span><text:span text:style-name="T304">～ </text:span><text:span text:style-name="T299">126</text:span></text:p>
          </table:table-cell>
          <table:table-cell table:style-name="表格39.A2" office:value-type="string">
            <text:p text:style-name="P25" loext:marker-style-name="T347"><text:span text:style-name="T348">/8</text:span><text:span text:style-name="T347"/></text:p>
          </table:table-cell>
          <table:table-cell table:style-name="表格39.A2" office:value-type="string">
            <text:p text:style-name="P25" loext:marker-style-name="T78"><text:span text:style-name="T77">超大型網路</text:span><text:span text:style-name="T78"/></text:p>
          </table:table-cell>
          <table:table-cell table:style-name="表格39.A2" office:value-type="string">
            <text:p text:style-name="P25" loext:marker-style-name="T78"><text:span text:style-name="T77">約 </text:span><text:span text:style-name="T138">1,677 </text:span><text:span text:style-name="T77">萬</text:span></text:p>
          </table:table-cell>
        </table:table-row>
        <table:table-row table:style-name="表格39.1">
          <table:table-cell table:style-name="表格39.A3" office:value-type="string">
            <text:p text:style-name="P25" loext:marker-style-name="T78"><text:span text:style-name="T138">B </text:span><text:span text:style-name="T77">類</text:span></text:p>
          </table:table-cell>
          <table:table-cell table:style-name="表格39.A3" office:value-type="string">
            <text:p text:style-name="P25" loext:marker-style-name="T306"><text:span text:style-name="T299">128 </text:span><text:span text:style-name="T304">～ </text:span><text:span text:style-name="T299">191</text:span></text:p>
          </table:table-cell>
          <table:table-cell table:style-name="表格39.A3" office:value-type="string">
            <text:p text:style-name="P25" loext:marker-style-name="T347"><text:span text:style-name="T348">/16</text:span><text:span text:style-name="T347"/></text:p>
          </table:table-cell>
          <table:table-cell table:style-name="表格39.A3" office:value-type="string">
            <text:p text:style-name="P25" loext:marker-style-name="T78"><text:span text:style-name="T77">中型網路</text:span><text:span text:style-name="T78"/></text:p>
          </table:table-cell>
          <table:table-cell table:style-name="表格39.A3" office:value-type="string">
            <text:p text:style-name="P25" loext:marker-style-name="T78"><text:span text:style-name="T77">約 </text:span><text:span text:style-name="T138">6.5 </text:span><text:span text:style-name="T77">萬</text:span></text:p>
          </table:table-cell>
        </table:table-row>
        <table:table-row table:style-name="表格39.1">
          <table:table-cell table:style-name="表格39.A2" office:value-type="string">
            <text:p text:style-name="P25" loext:marker-style-name="T78"><text:span text:style-name="T138">C </text:span><text:span text:style-name="T77">類</text:span></text:p>
          </table:table-cell>
          <table:table-cell table:style-name="表格39.A2" office:value-type="string">
            <text:p text:style-name="P25" loext:marker-style-name="T306"><text:span text:style-name="T299">192 </text:span><text:span text:style-name="T304">～ </text:span><text:span text:style-name="T299">223</text:span></text:p>
          </table:table-cell>
          <table:table-cell table:style-name="表格39.A2" office:value-type="string">
            <text:p text:style-name="P25" loext:marker-style-name="T347"><text:span text:style-name="T348">/24</text:span><text:span text:style-name="T347"/></text:p>
          </table:table-cell>
          <table:table-cell table:style-name="表格39.A2" office:value-type="string">
            <text:p text:style-name="P25" loext:marker-style-name="T78"><text:span text:style-name="T77">小型網路</text:span><text:span text:style-name="T78"/></text:p>
          </table:table-cell>
          <table:table-cell table:style-name="表格39.A2" office:value-type="string">
            <text:p text:style-name="P25" loext:marker-style-name="T78"><text:span text:style-name="T138">254</text:span><text:span text:style-name="T78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9"><text:span text:style-name="T200">127.x.x.x </text:span><text:span text:style-name="T195">為何不在 </text:span><text:span text:style-name="T200">A </text:span><text:span text:style-name="T195">類？　</text:span><text:span text:style-name="T149">127.0.0.1 </text:span><text:span text:style-name="T102">是回送位址（</text:span><text:span text:style-name="T149">Loopback</text:span><text:span text:style-name="T102">），保留給本機自我測試</text:span><text:span text:style-name="T99">；</text:span><text:span text:style-name="T507">ping 127.0.0.1 </text:span><text:span text:style-name="T489">可測本機協定是否正常，故 </text:span><text:span text:style-name="T507">A </text:span><text:span text:style-name="T489">類跳過 </text:span><text:span text:style-name="T507">127</text:span><text:span text:style-name="T99">，只到 </text:span><text:span text:style-name="T148">126</text:span><text:span text:style-name="T99">。</text:span></text:p>
            <text:p text:style-name="P10"><text:span text:style-name="T194">其他保留位址：</text:span><text:span text:style-name="T164">0.x.x.x</text:span><text:span text:style-name="T121">＝代表「這個網路本身」</text:span><text:span text:style-name="T99">；</text:span><text:span text:style-name="T163">224</text:span><text:span text:style-name="T120">～</text:span><text:span text:style-name="T163">239</text:span><text:span text:style-name="T120">＝</text:span><text:span text:style-name="T163">D </text:span><text:span text:style-name="T120">類（群播 </text:span><text:span text:style-name="T163">Multicast</text:span><text:span text:style-name="T120">）</text:span><text:span text:style-name="T99">；</text:span><text:span text:style-name="T160">240</text:span><text:span text:style-name="T117">～</text:span><text:span text:style-name="T160">255</text:span><text:span text:style-name="T117">＝</text:span><text:span text:style-name="T160">E </text:span><text:span text:style-name="T117">類（實驗用）</text:span><text:span text:style-name="T9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32" loext:marker-style-name="T101"><text:span text:style-name="T158">CIDR</text:span><text:span text:style-name="T115">（無類別網域間路由）</text:span><text:span text:style-name="T99">以</text:span><text:span text:style-name="T266">「</text:span><text:span text:style-name="T283">IP + / + </text:span><text:span text:style-name="T266">數字」精確表示網路大小</text:span><text:span text:style-name="T99">，例如 </text:span><text:span text:style-name="T148">192.168.1.0/24</text:span><text:span text:style-name="T99">。</text:span><text:span text:style-name="T324">/ </text:span><text:span text:style-name="T313">後面的數字 ＝ 前幾個 </text:span><text:span text:style-name="T324">bit </text:span><text:span text:style-name="T313">是「網路部分」（固定不變）</text:span><text:span text:style-name="T99">，</text:span><text:span text:style-name="T238">剩下的才是「主機部分」（可變）</text:span><text:span text:style-name="T99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6" loext:marker-style-name="T65"><text:span text:style-name="T64">表示法</text:span><text:span text:style-name="T65"/></text:p>
            </table:table-cell>
            <table:table-cell table:style-name="表格40.A1" office:value-type="string">
              <text:p text:style-name="P6" loext:marker-style-name="T65"><text:span text:style-name="T64">網路 </text:span><text:span text:style-name="T74">bit</text:span></text:p>
            </table:table-cell>
            <table:table-cell table:style-name="表格40.A1" office:value-type="string">
              <text:p text:style-name="P6" loext:marker-style-name="T65"><text:span text:style-name="T64">主機 </text:span><text:span text:style-name="T74">bit</text:span></text:p>
            </table:table-cell>
            <table:table-cell table:style-name="表格40.A1" office:value-type="string">
              <text:p text:style-name="P6" loext:marker-style-name="T65"><text:span text:style-name="T74">IP </text:span><text:span text:style-name="T64">總數</text:span></text:p>
            </table:table-cell>
            <table:table-cell table:style-name="表格40.A1" office:value-type="string">
              <text:p text:style-name="P6" loext:marker-style-name="T65"><text:span text:style-name="T64">對應哪段固定</text:span><text:span text:style-name="T65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5" loext:marker-style-name="T347"><text:span text:style-name="T348">/8</text:span><text:span text:style-name="T347"/></text:p>
          </table:table-cell>
          <table:table-cell table:style-name="表格40.A2" office:value-type="string">
            <text:p text:style-name="P25" loext:marker-style-name="T359"><text:span text:style-name="T352">8</text:span><text:span text:style-name="T359"/></text:p>
          </table:table-cell>
          <table:table-cell table:style-name="表格40.A2" office:value-type="string">
            <text:p text:style-name="P25" loext:marker-style-name="T253"><text:span text:style-name="T243">24</text:span><text:span text:style-name="T253"/></text:p>
          </table:table-cell>
          <table:table-cell table:style-name="表格40.A2" office:value-type="string">
            <text:p text:style-name="P25" loext:marker-style-name="T424"><text:span text:style-name="T420">16,777,216</text:span><text:span text:style-name="T424"/></text:p>
          </table:table-cell>
          <table:table-cell table:style-name="表格40.A2" office:value-type="string">
            <text:p text:style-name="P25" loext:marker-style-name="T78"><text:span text:style-name="T77">第 </text:span><text:span text:style-name="T138">1 </text:span><text:span text:style-name="T77">組（</text:span><text:span text:style-name="T138">A </text:span><text:span text:style-name="T77">類）</text:span></text:p>
          </table:table-cell>
        </table:table-row>
        <table:table-row table:style-name="表格40.1">
          <table:table-cell table:style-name="表格40.A3" office:value-type="string">
            <text:p text:style-name="P25" loext:marker-style-name="T347"><text:span text:style-name="T348">/16</text:span><text:span text:style-name="T347"/></text:p>
          </table:table-cell>
          <table:table-cell table:style-name="表格40.A3" office:value-type="string">
            <text:p text:style-name="P25" loext:marker-style-name="T359"><text:span text:style-name="T352">16</text:span><text:span text:style-name="T359"/></text:p>
          </table:table-cell>
          <table:table-cell table:style-name="表格40.A3" office:value-type="string">
            <text:p text:style-name="P25" loext:marker-style-name="T253"><text:span text:style-name="T243">16</text:span><text:span text:style-name="T253"/></text:p>
          </table:table-cell>
          <table:table-cell table:style-name="表格40.A3" office:value-type="string">
            <text:p text:style-name="P25" loext:marker-style-name="T424"><text:span text:style-name="T420">65,536</text:span><text:span text:style-name="T424"/></text:p>
          </table:table-cell>
          <table:table-cell table:style-name="表格40.A3" office:value-type="string">
            <text:p text:style-name="P25" loext:marker-style-name="T78"><text:span text:style-name="T77">第 </text:span><text:span text:style-name="T138">1-2 </text:span><text:span text:style-name="T77">組（</text:span><text:span text:style-name="T138">B </text:span><text:span text:style-name="T77">類）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347"><text:span text:style-name="T348">/24</text:span><text:span text:style-name="T347"/></text:p>
          </table:table-cell>
          <table:table-cell table:style-name="表格40.A2" office:value-type="string">
            <text:p text:style-name="P25" loext:marker-style-name="T359"><text:span text:style-name="T352">24</text:span><text:span text:style-name="T359"/></text:p>
          </table:table-cell>
          <table:table-cell table:style-name="表格40.A2" office:value-type="string">
            <text:p text:style-name="P25" loext:marker-style-name="T253"><text:span text:style-name="T243">8</text:span><text:span text:style-name="T253"/></text:p>
          </table:table-cell>
          <table:table-cell table:style-name="表格40.A2" office:value-type="string">
            <text:p text:style-name="P25" loext:marker-style-name="T424"><text:span text:style-name="T420">256</text:span><text:span text:style-name="T424"/></text:p>
          </table:table-cell>
          <table:table-cell table:style-name="表格40.A2" office:value-type="string">
            <text:p text:style-name="P25" loext:marker-style-name="T78"><text:span text:style-name="T77">第 </text:span><text:span text:style-name="T138">1-3 </text:span><text:span text:style-name="T77">組（</text:span><text:span text:style-name="T138">C </text:span><text:span text:style-name="T77">類）</text:span></text:p>
          </table:table-cell>
        </table:table-row>
        <table:table-row table:style-name="表格40.1">
          <table:table-cell table:style-name="表格40.A3" office:value-type="string">
            <text:p text:style-name="P25" loext:marker-style-name="T347"><text:span text:style-name="T348">/25</text:span><text:span text:style-name="T347"/></text:p>
          </table:table-cell>
          <table:table-cell table:style-name="表格40.A3" office:value-type="string">
            <text:p text:style-name="P25" loext:marker-style-name="T359"><text:span text:style-name="T352">25</text:span><text:span text:style-name="T359"/></text:p>
          </table:table-cell>
          <table:table-cell table:style-name="表格40.A3" office:value-type="string">
            <text:p text:style-name="P25" loext:marker-style-name="T253"><text:span text:style-name="T243">7</text:span><text:span text:style-name="T253"/></text:p>
          </table:table-cell>
          <table:table-cell table:style-name="表格40.A3" office:value-type="string">
            <text:p text:style-name="P25" loext:marker-style-name="T424"><text:span text:style-name="T420">128</text:span><text:span text:style-name="T424"/></text:p>
          </table:table-cell>
          <table:table-cell table:style-name="表格40.A3" office:value-type="string">
            <text:p text:style-name="P25" loext:marker-style-name="T78"><text:span text:style-name="T77">第 </text:span><text:span text:style-name="T138">1-3 </text:span><text:span text:style-name="T77">組 </text:span><text:span text:style-name="T138">+ </text:span><text:span text:style-name="T77">第 </text:span><text:span text:style-name="T138">4 </text:span><text:span text:style-name="T77">組前 </text:span><text:span text:style-name="T138">1 bit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347"><text:span text:style-name="T348">/26</text:span><text:span text:style-name="T347"/></text:p>
          </table:table-cell>
          <table:table-cell table:style-name="表格40.A2" office:value-type="string">
            <text:p text:style-name="P25" loext:marker-style-name="T360"><text:span text:style-name="T353">26</text:span><text:span text:style-name="T360"/></text:p>
          </table:table-cell>
          <table:table-cell table:style-name="表格40.A2" office:value-type="string">
            <text:p text:style-name="P25" loext:marker-style-name="T254"><text:span text:style-name="T244">6</text:span><text:span text:style-name="T254"/></text:p>
          </table:table-cell>
          <table:table-cell table:style-name="表格40.A2" office:value-type="string">
            <text:p text:style-name="P25" loext:marker-style-name="T424"><text:span text:style-name="T420">64</text:span><text:span text:style-name="T424"/></text:p>
          </table:table-cell>
          <table:table-cell table:style-name="表格40.A2" office:value-type="string">
            <text:p text:style-name="P25" loext:marker-style-name="T78"><text:span text:style-name="T77">第 </text:span><text:span text:style-name="T138">1-3 </text:span><text:span text:style-name="T77">組 </text:span><text:span text:style-name="T138">+ </text:span><text:span text:style-name="T77">第 </text:span><text:span text:style-name="T138">4 </text:span><text:span text:style-name="T77">組前 </text:span><text:span text:style-name="T138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5" loext:marker-style-name="T347"><text:span text:style-name="T348">/27</text:span><text:span text:style-name="T347"/></text:p>
          </table:table-cell>
          <table:table-cell table:style-name="表格40.A3" office:value-type="string">
            <text:p text:style-name="P25" loext:marker-style-name="T360"><text:span text:style-name="T353">27</text:span><text:span text:style-name="T360"/></text:p>
          </table:table-cell>
          <table:table-cell table:style-name="表格40.A3" office:value-type="string">
            <text:p text:style-name="P25" loext:marker-style-name="T254"><text:span text:style-name="T244">5</text:span><text:span text:style-name="T254"/></text:p>
          </table:table-cell>
          <table:table-cell table:style-name="表格40.A3" office:value-type="string">
            <text:p text:style-name="P25" loext:marker-style-name="T424"><text:span text:style-name="T420">32</text:span><text:span text:style-name="T424"/></text:p>
          </table:table-cell>
          <table:table-cell table:style-name="表格40.A3" office:value-type="string">
            <text:p text:style-name="P25" loext:marker-style-name="T78"><text:span text:style-name="T77">第 </text:span><text:span text:style-name="T138">1-3 </text:span><text:span text:style-name="T77">組 </text:span><text:span text:style-name="T138">+ </text:span><text:span text:style-name="T77">第 </text:span><text:span text:style-name="T138">4 </text:span><text:span text:style-name="T77">組前 </text:span><text:span text:style-name="T138">3 bit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347"><text:span text:style-name="T348">/28</text:span><text:span text:style-name="T347"/></text:p>
          </table:table-cell>
          <table:table-cell table:style-name="表格40.A2" office:value-type="string">
            <text:p text:style-name="P25" loext:marker-style-name="T360"><text:span text:style-name="T353">28</text:span><text:span text:style-name="T360"/></text:p>
          </table:table-cell>
          <table:table-cell table:style-name="表格40.A2" office:value-type="string">
            <text:p text:style-name="P25" loext:marker-style-name="T254"><text:span text:style-name="T244">4</text:span><text:span text:style-name="T254"/></text:p>
          </table:table-cell>
          <table:table-cell table:style-name="表格40.A2" office:value-type="string">
            <text:p text:style-name="P25" loext:marker-style-name="T424"><text:span text:style-name="T420">16</text:span><text:span text:style-name="T424"/></text:p>
          </table:table-cell>
          <table:table-cell table:style-name="表格40.A2" office:value-type="string">
            <text:p text:style-name="P25" loext:marker-style-name="T78"><text:span text:style-name="T77">第 </text:span><text:span text:style-name="T138">1-3 </text:span><text:span text:style-name="T77">組 </text:span><text:span text:style-name="T138">+ </text:span><text:span text:style-name="T77">第 </text:span><text:span text:style-name="T138">4 </text:span><text:span text:style-name="T77">組前 </text:span><text:span text:style-name="T138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8"><text:span text:style-name="T176">▸ <text:s/></text:span><text:span text:style-name="T47">用 </text:span><text:span text:style-name="T58">bit </text:span><text:span text:style-name="T47">切割理解 </text:span><text:span text:style-name="T58">/26</text:span></text:p>
            <text:p text:style-name="P9" loext:marker-style-name="T101"><text:span text:style-name="T99">以 </text:span><text:span text:style-name="T148">192.168.1.0</text:span><text:span text:style-name="T149">/26</text:span><text:span text:style-name="T148"> </text:span><text:span text:style-name="T99">為例：</text:span></text:p>
            <text:p text:style-name="P10"><text:span text:style-name="T60">11000000 . 10101000 . 00000001 . 00</text:span><text:span text:style-name="T40">|000000</text:span></text:p>
            <text:p text:style-name="P10" loext:marker-style-name="T101"><text:span text:style-name="T148">└── </text:span><text:span text:style-name="T117">前 </text:span><text:span text:style-name="T160">26 bit</text:span><text:span text:style-name="T117">（固定＝網路）</text:span><text:span text:style-name="T99">──┘ └ </text:span><text:span text:style-name="T266">後 </text:span><text:span text:style-name="T283">6 bit</text:span><text:span text:style-name="T266">（可變＝主機）</text:span><text:span text:style-name="T99">┘</text:span></text:p>
            <text:p text:style-name="P10" loext:marker-style-name="T101"><text:span text:style-name="T148">→ </text:span><text:span text:style-name="T519">主機 </text:span><text:span text:style-name="T520">bit </text:span><text:span text:style-name="T519">有 </text:span><text:span text:style-name="T520">6 </text:span><text:span text:style-name="T519">個 → </text:span><text:span text:style-name="T520">2⁶ = 64 </text:span><text:span text:style-name="T519">個 </text:span><text:span text:style-name="T520">IP</text:span><text:span text:style-name="T9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6" loext:marker-style-name="T65"><text:span text:style-name="T64">名稱</text:span><text:span text:style-name="T65"/></text:p>
            </table:table-cell>
            <table:table-cell table:style-name="表格41.A1" office:value-type="string">
              <text:p text:style-name="P6" loext:marker-style-name="T65"><text:span text:style-name="T64">位置</text:span><text:span text:style-name="T65"/></text:p>
            </table:table-cell>
            <table:table-cell table:style-name="表格41.A1" office:value-type="string">
              <text:p text:style-name="P6" loext:marker-style-name="T65"><text:span text:style-name="T64">用途</text:span><text:span text:style-name="T65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5" loext:marker-style-name="T439"><text:span text:style-name="T438">網路位址 </text:span><text:span text:style-name="T457">Network Address</text:span></text:p>
          </table:table-cell>
          <table:table-cell table:style-name="表格41.A2" office:value-type="string">
            <text:p text:style-name="P25" loext:marker-style-name="T306"><text:span text:style-name="T304">第一個 </text:span><text:span text:style-name="T299">IP</text:span><text:span text:style-name="T304">（最小）</text:span></text:p>
          </table:table-cell>
          <table:table-cell table:style-name="表格41.A2" office:value-type="string">
            <text:p text:style-name="P25" loext:marker-style-name="T78"><text:span text:style-name="T77">代表這整個子網路本身，不能分配給設備</text:span><text:span text:style-name="T78"/></text:p>
          </table:table-cell>
        </table:table-row>
        <table:table-row table:style-name="表格41.1">
          <table:table-cell table:style-name="表格41.A3" office:value-type="string">
            <text:p text:style-name="P25" loext:marker-style-name="T439"><text:span text:style-name="T438">廣播位址 </text:span><text:span text:style-name="T457">Broadcast Address</text:span></text:p>
          </table:table-cell>
          <table:table-cell table:style-name="表格41.A3" office:value-type="string">
            <text:p text:style-name="P25" loext:marker-style-name="T306"><text:span text:style-name="T304">最後一個 </text:span><text:span text:style-name="T299">IP</text:span><text:span text:style-name="T304">（最大）</text:span></text:p>
          </table:table-cell>
          <table:table-cell table:style-name="表格41.A3" office:value-type="string">
            <text:p text:style-name="P25" loext:marker-style-name="T78"><text:span text:style-name="T330">送到此位址＝網路內所有設備都收到</text:span><text:span text:style-name="T77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9" loext:marker-style-name="T229"><text:span text:style-name="T228">可用主機數 ＝ </text:span><text:span text:style-name="T234">IP </text:span><text:span text:style-name="T228">總數 − </text:span><text:span text:style-name="T234">2</text:span></text:p>
            <text:p text:style-name="P10" loext:marker-style-name="T101"><text:span text:style-name="T99">【</text:span><text:span text:style-name="T148">/24 </text:span><text:span text:style-name="T99">示範】</text:span><text:span text:style-name="T158">192.168.1.0</text:span><text:span text:style-name="T115">＝網路位址（不能用）</text:span><text:span text:style-name="T99">… </text:span><text:span text:style-name="T163">192.168.1.255</text:span><text:span text:style-name="T120">＝廣播位址（不能用）</text:span><text:span text:style-name="T99">→ </text:span><text:span text:style-name="T482">共 </text:span><text:span text:style-name="T477">256 </text:span><text:span text:style-name="T482">個，可用 </text:span><text:span text:style-name="T477">254 </text:span><text:span text:style-name="T482">個</text:span><text:span text:style-name="T99">。</text:span></text:p>
            <text:p text:style-name="P10" loext:marker-style-name="T101"><text:span text:style-name="T99">【</text:span><text:span text:style-name="T148">/26 </text:span><text:span text:style-name="T99">示範</text:span><text:span text:style-name="T148">·</text:span><text:span text:style-name="T99">最常考】</text:span><text:span text:style-name="T158">192.168.1.0</text:span><text:span text:style-name="T115">＝網路位址</text:span><text:span text:style-name="T99"> … </text:span><text:span text:style-name="T163">192.168.1.63</text:span><text:span text:style-name="T120">＝廣播位址</text:span><text:span text:style-name="T99"> → </text:span><text:span text:style-name="T482">共 </text:span><text:span text:style-name="T477">64 </text:span><text:span text:style-name="T482">個（</text:span><text:span text:style-name="T477">2⁶</text:span><text:span text:style-name="T482">），可用 </text:span><text:span text:style-name="T477">62 </text:span><text:span text:style-name="T482">個</text:span><text:span text:style-name="T99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9"><text:span text:style-name="T196">唯一例外 </text:span><text:span text:style-name="T201">/31</text:span><text:span text:style-name="T196">（點對點，</text:span><text:span text:style-name="T201">RFC 3021</text:span><text:span text:style-name="T196">）：</text:span><text:span text:style-name="T375">只有 </text:span><text:span text:style-name="T387">2 </text:span><text:span text:style-name="T375">個 </text:span><text:span text:style-name="T387">IP</text:span><text:span text:style-name="T383">，</text:span><text:span text:style-name="T375">兩個都可用作主機</text:span><text:span text:style-name="T266">，沒有網路位址和廣播位址</text:span><text:span text:style-name="T99">。考試若未特別提到，預設仍要 −</text:span><text:span text:style-name="T148">2</text:span><text:span text:style-name="T99">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伍、</text:span><text:span text:style-name="T27">VLSM</text:span><text:span text:style-name="T28">（可變長度子網路遮罩）</text:span></text:h>
      <text:p text:style-name="P32" loext:marker-style-name="T101"><text:span text:style-name="T148">VLSM </text:span><text:span text:style-name="T99">的做法：</text:span><text:span text:style-name="T115">依各部門「實際需求」分配</text:span><text:span text:style-name="T408">剛剛好大小</text:span><text:span text:style-name="T115">的子網路，</text:span><text:span text:style-name="T446">不多給、不浪費</text:span><text:span text:style-name="T99">。例如 </text:span><text:span text:style-name="T148">A </text:span><text:span text:style-name="T99">部門 </text:span><text:span text:style-name="T148">100 </text:span><text:span text:style-name="T99">台、</text:span><text:span text:style-name="T148">B </text:span><text:span text:style-name="T99">部門 </text:span><text:span text:style-name="T148">50 </text:span><text:span text:style-name="T99">台、</text:span><text:span text:style-name="T148">C </text:span><text:span text:style-name="T99">部門 </text:span><text:span text:style-name="T148">10 </text:span><text:span text:style-name="T99">台，</text:span><text:span text:style-name="T376">若全用 </text:span><text:span text:style-name="T388">/24 </text:span><text:span text:style-name="T376">會浪費大量 </text:span><text:span text:style-name="T388">IP</text:span><text:span text:style-name="T99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><text:span text:style-name="T176">📋 <text:s/></text:span><text:span text:style-name="T190">VLSM </text:span><text:span text:style-name="T180">標準流程（三步驟）</text:span></text:p>
            <text:p text:style-name="P9" loext:marker-style-name="T185"><text:span text:style-name="T191">①</text:span><text:span text:style-name="T193"> </text:span><text:span text:style-name="T184">將需求由大到小排序</text:span></text:p>
            <text:p text:style-name="P10"><text:span text:style-name="T191">② </text:span><text:span text:style-name="T184">計算每個需求所需前綴</text:span><text:span text:style-name="T183">：</text:span><text:span text:style-name="T429">需求 </text:span><text:span text:style-name="T431">+ 2 → </text:span><text:span text:style-name="T429">找最小 </text:span><text:span text:style-name="T431">2ⁿ → </text:span><text:span text:style-name="T429">前綴 </text:span><text:span text:style-name="T431">= 32 − n</text:span></text:p>
            <text:p text:style-name="P10" loext:marker-style-name="T185"><text:span text:style-name="T191">③ </text:span><text:span text:style-name="T183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9"><text:span text:style-name="T194">為什麼要「由大到小」？　</text:span><text:span text:style-name="T99">因為「對齊（</text:span><text:span text:style-name="T148">Alignment</text:span><text:span text:style-name="T99">）」：</text:span><text:span text:style-name="T266">子網路的起始位址必須是其大小的整數倍</text:span><text:span text:style-name="T99">。</text:span><text:span text:style-name="T521">大小 </text:span><text:span text:style-name="T534">128 </text:span><text:span text:style-name="T521">的子網只能從 </text:span><text:span text:style-name="T534">0</text:span><text:span text:style-name="T521">、</text:span><text:span text:style-name="T534">128… </text:span><text:span text:style-name="T521">開始；大小 </text:span><text:span text:style-name="T534">64 </text:span><text:span text:style-name="T521">的只能從 </text:span><text:span text:style-name="T534">0</text:span><text:span text:style-name="T521">、</text:span><text:span text:style-name="T534">64</text:span><text:span text:style-name="T521">、</text:span><text:span text:style-name="T534">128… </text:span><text:span text:style-name="T521">開始</text:span><text:span text:style-name="T99">。</text:span></text:p>
            <text:p text:style-name="P10"><text:span text:style-name="T194">反面示範：</text:span><text:span text:style-name="T99">若先切小的 </text:span><text:span text:style-name="T148">C</text:span><text:span text:style-name="T99">（</text:span><text:span text:style-name="T148">/28</text:span><text:span text:style-name="T99">，</text:span><text:span text:style-name="T148">0</text:span><text:span text:style-name="T99">～</text:span><text:span text:style-name="T148">15</text:span><text:span text:style-name="T99">），</text:span><text:span text:style-name="T409">再切大的 </text:span><text:span text:style-name="T414">A</text:span><text:span text:style-name="T409">（</text:span><text:span text:style-name="T414">/25</text:span><text:span text:style-name="T409">，</text:span><text:span text:style-name="T414">128 </text:span><text:span text:style-name="T409">個），最近可用對齊位址是 </text:span><text:span text:style-name="T414">128</text:span><text:span text:style-name="T148"> → </text:span><text:span text:style-name="T268">中間 </text:span><text:span text:style-name="T285">16</text:span><text:span text:style-name="T268">～</text:span><text:span text:style-name="T285">127 </text:span><text:span text:style-name="T268">共 </text:span><text:span text:style-name="T285">112 </text:span><text:span text:style-name="T268">個 </text:span><text:span text:style-name="T285">IP </text:span><text:span text:style-name="T268">全浪費！</text:span><text:span text:style-name="T99">正解：</text:span><text:span text:style-name="T313">先切大的，大的天然對齊，小的再從後面切</text:span><text:span text:style-name="T99">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1">前綴計算公式詳解</text:span><text:span text:style-name="T180">（以</text:span><text:span text:style-name="T454">需要 </text:span><text:span text:style-name="T455">100 </text:span><text:span text:style-name="T454">台主機為例</text:span><text:span text:style-name="T180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" loext:marker-style-name="T101"><text:span text:style-name="T148">① </text:span><text:span text:style-name="T117">加 </text:span><text:span text:style-name="T160">2</text:span><text:span text:style-name="T117">（預留網路 </text:span><text:span text:style-name="T160">+ </text:span><text:span text:style-name="T117">廣播）</text:span><text:span text:style-name="T99">：</text:span><text:span text:style-name="T149">100 + 2 = 102</text:span></text:p>
            <text:p text:style-name="P10" loext:marker-style-name="T101"><text:span text:style-name="T148">② </text:span><text:span text:style-name="T104">找「大於等於 </text:span><text:span text:style-name="T151">102</text:span><text:span text:style-name="T104">」的最小 </text:span><text:span text:style-name="T151">2ⁿ</text:span><text:span text:style-name="T99">：</text:span><text:span text:style-name="T148">2⁶ = 64</text:span><text:span text:style-name="T99">（太小）、</text:span><text:span text:style-name="T283">2⁷ = 128</text:span><text:span text:style-name="T266">（夠）→ </text:span><text:span text:style-name="T283">n = 7</text:span></text:p>
            <text:p text:style-name="P10" loext:marker-style-name="T101"><text:span text:style-name="T148">③ </text:span><text:span text:style-name="T313">前綴 </text:span><text:span text:style-name="T324">= 32 − n = 32 − 7 = 25</text:span><text:span text:style-name="T148"> →</text:span><text:span text:style-name="T395"> </text:span><text:span text:style-name="T377">使用 </text:span><text:span text:style-name="T389">/25</text:span><text:span text:style-name="T377">（驗證：</text:span><text:span text:style-name="T389">2⁷ = 128</text:span><text:span text:style-name="T377">，可用 </text:span><text:span text:style-name="T389">126 ≥ 100 ✔</text:span><text:span text:style-name="T377">）</text:span></text:p>
            <text:p text:style-name="P10" loext:marker-style-name="T26"><text:span text:style-name="T25">公式一句話</text:span><text:span text:style-name="T24">：</text:span><text:span text:style-name="T483">需求 </text:span><text:span text:style-name="T478">+2 → </text:span><text:span text:style-name="T483">找最小 </text:span><text:span text:style-name="T478">2ⁿ</text:span><text:span text:style-name="T40"> → </text:span><text:span text:style-name="T283">/(32−n)</text:span></text:p>
          </table:table-cell>
        </table:table-row>
      </table:table>
      <text:h text:style-name="P3" text:outline-level="3"><text:soft-page-break/><text:span text:style-name="T178">▍</text:span><text:span text:style-name="T179"> </text:span><text:span text:style-name="T180">完整範例：起始 </text:span><text:span text:style-name="T179">192.168.1.0/24</text:span><text:span text:style-name="T180">，需求 </text:span><text:span text:style-name="T179">A=100</text:span><text:span text:style-name="T180">、</text:span><text:span text:style-name="T179">B=50</text:span><text:span text:style-name="T180">、</text:span><text:span text:style-name="T179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6" loext:marker-style-name="T71"><text:span text:style-name="T70">部門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0">需求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6">+2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6">2ⁿ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0">前綴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0">切割結果（範圍）</text:span><text:span text:style-name="T71"/></text:p>
            </table:table-cell>
            <table:table-cell table:style-name="表格44.A1" office:value-type="string">
              <text:p text:style-name="P6" loext:marker-style-name="T71"><text:span text:style-name="T70">可用 </text:span><text:span text:style-name="T76">/ </text:span><text:span text:style-name="T70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5" loext:marker-style-name="T129"><text:span text:style-name="T170">A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00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02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28</text:span><text:span text:style-name="T130">（</text:span><text:span text:style-name="T170">2</text:span><text:span text:style-name="T171">⁷</text:span><text:span text:style-name="T130">）</text:span></text:p>
          </table:table-cell>
          <table:table-cell table:style-name="表格44.A2" office:value-type="string">
            <text:p text:style-name="P25" loext:marker-style-name="T134"><text:span text:style-name="T172">/25</text:span><text:span text:style-name="T134"/></text:p>
          </table:table-cell>
          <table:table-cell table:style-name="表格44.A2" office:value-type="string">
            <text:p text:style-name="P25" loext:marker-style-name="T129"><text:span text:style-name="T170">192.168.1.0</text:span><text:span text:style-name="T172">/25</text:span><text:span text:style-name="T130">（</text:span><text:span text:style-name="T170">0</text:span><text:span text:style-name="T130">～</text:span><text:span text:style-name="T384">127</text:span><text:span text:style-name="T130">）</text:span></text:p>
          </table:table-cell>
          <table:table-cell table:style-name="表格44.A2" office:value-type="string">
            <text:p text:style-name="P25" loext:marker-style-name="T129"><text:span text:style-name="T170">126 ≥ 100 ✔</text:span><text:span text:style-name="T129"/></text:p>
          </table:table-cell>
        </table:table-row>
        <table:table-row table:style-name="表格44.1">
          <table:table-cell table:style-name="表格44.A3" office:value-type="string">
            <text:p text:style-name="P25" loext:marker-style-name="T129"><text:span text:style-name="T170">B</text:span><text:span text:style-name="T129"/></text:p>
          </table:table-cell>
          <table:table-cell table:style-name="表格44.A3" office:value-type="string">
            <text:p text:style-name="P25" loext:marker-style-name="T129"><text:span text:style-name="T170">50</text:span><text:span text:style-name="T129"/></text:p>
          </table:table-cell>
          <table:table-cell table:style-name="表格44.A3" office:value-type="string">
            <text:p text:style-name="P25" loext:marker-style-name="T129"><text:span text:style-name="T170">52</text:span><text:span text:style-name="T129"/></text:p>
          </table:table-cell>
          <table:table-cell table:style-name="表格44.A3" office:value-type="string">
            <text:p text:style-name="P25" loext:marker-style-name="T129"><text:span text:style-name="T170">64</text:span><text:span text:style-name="T130">（</text:span><text:span text:style-name="T170">2</text:span><text:span text:style-name="T171">⁶</text:span><text:span text:style-name="T130">）</text:span></text:p>
          </table:table-cell>
          <table:table-cell table:style-name="表格44.A3" office:value-type="string">
            <text:p text:style-name="P25" loext:marker-style-name="T134"><text:span text:style-name="T172">/26</text:span><text:span text:style-name="T134"/></text:p>
          </table:table-cell>
          <table:table-cell table:style-name="表格44.A3" office:value-type="string">
            <text:p text:style-name="P25" loext:marker-style-name="T129"><text:span text:style-name="T170">192.168.1.128</text:span><text:span text:style-name="T172">/26</text:span><text:span text:style-name="T130">（</text:span><text:span text:style-name="T170">128</text:span><text:span text:style-name="T130">～</text:span><text:span text:style-name="T384">191</text:span><text:span text:style-name="T130">）</text:span></text:p>
          </table:table-cell>
          <table:table-cell table:style-name="表格44.A3" office:value-type="string">
            <text:p text:style-name="P25" loext:marker-style-name="T129"><text:span text:style-name="T170">62 ≥ 50 ✔</text:span><text:span text:style-name="T129"/></text:p>
          </table:table-cell>
        </table:table-row>
        <table:table-row table:style-name="表格44.1">
          <table:table-cell table:style-name="表格44.A2" office:value-type="string">
            <text:p text:style-name="P25" loext:marker-style-name="T129"><text:span text:style-name="T170">C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0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2</text:span><text:span text:style-name="T129"/></text:p>
          </table:table-cell>
          <table:table-cell table:style-name="表格44.A2" office:value-type="string">
            <text:p text:style-name="P25" loext:marker-style-name="T129"><text:span text:style-name="T170">16</text:span><text:span text:style-name="T130">（</text:span><text:span text:style-name="T170">2</text:span><text:span text:style-name="T171">⁴</text:span><text:span text:style-name="T130">）</text:span></text:p>
          </table:table-cell>
          <table:table-cell table:style-name="表格44.A2" office:value-type="string">
            <text:p text:style-name="P25" loext:marker-style-name="T134"><text:span text:style-name="T172">/28</text:span><text:span text:style-name="T134"/></text:p>
          </table:table-cell>
          <table:table-cell table:style-name="表格44.A2" office:value-type="string">
            <text:p text:style-name="P25" loext:marker-style-name="T129"><text:span text:style-name="T170">192.168.1.192</text:span><text:span text:style-name="T172">/28</text:span><text:span text:style-name="T130">（</text:span><text:span text:style-name="T170">192</text:span><text:span text:style-name="T130">～</text:span><text:span text:style-name="T384">207</text:span><text:span text:style-name="T130">）</text:span></text:p>
          </table:table-cell>
          <table:table-cell table:style-name="表格44.A2" office:value-type="string">
            <text:p text:style-name="P25" loext:marker-style-name="T129"><text:span text:style-name="T170">14 ≥ 10 ✔</text:span><text:span text:style-name="T129"/></text:p>
          </table:table-cell>
        </table:table-row>
      </table:table>
      <text:p text:style-name="P32" loext:marker-style-name="T11"><text:span text:style-name="T10">剩餘 </text:span><text:span text:style-name="T20">192.168.1.208 </text:span><text:span text:style-name="T10">～ </text:span><text:span text:style-name="T20">.255</text:span><text:span text:style-name="T10">（</text:span><text:span text:style-name="T20">48 </text:span><text:span text:style-name="T10">個 </text:span><text:span text:style-name="T20">IP</text:span><text:span text:style-name="T10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8"><text:span text:style-name="T176">💡 <text:s/></text:span><text:span text:style-name="T226">考試技巧</text:span></text:p>
            <text:p text:style-name="P9" loext:marker-style-name="T101"><text:span text:style-name="T378">快速判斷一個 </text:span><text:span text:style-name="T390">IP </text:span><text:span text:style-name="T378">屬於哪個 </text:span><text:span text:style-name="T390">/26 </text:span><text:span text:style-name="T378">子網</text:span><text:span text:style-name="T99">（</text:span><text:span text:style-name="T266">每段 </text:span><text:span text:style-name="T283">64 </text:span><text:span text:style-name="T266">個，起點 </text:span><text:span text:style-name="T283">0</text:span><text:span text:style-name="T266">、</text:span><text:span text:style-name="T283">64</text:span><text:span text:style-name="T266">、</text:span><text:span text:style-name="T283">128</text:span><text:span text:style-name="T266">、</text:span><text:span text:style-name="T283">192</text:span><text:span text:style-name="T99">）：</text:span><text:span text:style-name="T115">看最後一個 </text:span><text:span text:style-name="T158">Octet </text:span><text:span text:style-name="T115">落在哪個區間 </text:span><text:span text:style-name="T99">→</text:span></text:p>
            <text:p text:style-name="P10" loext:marker-style-name="T101"><text:span text:style-name="T160">0</text:span><text:span text:style-name="T117">～</text:span><text:span text:style-name="T160">63</text:span><text:span text:style-name="T148"> → x.0/26</text:span><text:span text:style-name="T99">　｜　</text:span><text:span text:style-name="T160">64</text:span><text:span text:style-name="T117">～</text:span><text:span text:style-name="T160">127</text:span><text:span text:style-name="T148"> → x.64/26</text:span><text:span text:style-name="T99">　｜　</text:span><text:span text:style-name="T160">128</text:span><text:span text:style-name="T117">～</text:span><text:span text:style-name="T160">191</text:span><text:span text:style-name="T148"> → x.128/26</text:span><text:span text:style-name="T99">　｜　</text:span><text:span text:style-name="T160">192</text:span><text:span text:style-name="T117">～</text:span><text:span text:style-name="T160">255</text:span><text:span text:style-name="T148"> → x.192/26</text:span></text:p>
          </table:table-cell>
        </table:table-row>
      </table:table>
      <text:h text:style-name="P2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32" loext:marker-style-name="T101"><text:span text:style-name="T148">CIDR </text:span><text:span text:style-name="T99">的合併功能是 </text:span><text:span text:style-name="T148">VLSM </text:span><text:span text:style-name="T99">的「反向操作」：</text:span><text:span text:style-name="T415">VLSM </text:span><text:span text:style-name="T407">把大網路切小</text:span><text:span text:style-name="T99">；</text:span><text:span text:style-name="T391">CIDR </text:span><text:span text:style-name="T379">合併把小網路合成一個大網路表示</text:span><text:span text:style-name="T99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"><text:span text:style-name="T176">🔑 </text:span><text:span text:style-name="T177"><text:s/></text:span><text:span text:style-name="T182">合併三條件（缺一不可）</text:span></text:p>
            <text:p text:style-name="P9"><text:span text:style-name="T191">① </text:span><text:span text:style-name="T184">連續（</text:span><text:span text:style-name="T193">Contiguous</text:span><text:span text:style-name="T184">）</text:span><text:span text:style-name="T183">：</text:span><text:span text:style-name="T283">IP </text:span><text:span text:style-name="T266">範圍必須緊鄰</text:span><text:span text:style-name="T99">，</text:span><text:span text:style-name="T313">中間不能有空缺</text:span><text:span text:style-name="T99">。</text:span></text:p>
            <text:p text:style-name="P10"><text:span text:style-name="T191">② </text:span><text:span text:style-name="T184">數量是 </text:span><text:span text:style-name="T193">2ⁿ</text:span><text:span text:style-name="T183">：</text:span><text:span text:style-name="T148">2</text:span><text:span text:style-name="T99">、</text:span><text:span text:style-name="T148">4</text:span><text:span text:style-name="T99">、</text:span><text:span text:style-name="T148">8…</text:span><text:span text:style-name="T99">。</text:span></text:p>
            <text:p text:style-name="P10"><text:span text:style-name="T191">③ </text:span><text:span text:style-name="T184">起始位址對齊</text:span><text:span text:style-name="T183">：</text:span><text:span text:style-name="T9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8"><text:span text:style-name="T176">▸ <text:s/></text:span><text:span text:style-name="T47">合併範例與反例</text:span></text:p>
            <text:p text:style-name="P9"><text:span text:style-name="T114">範例：</text:span><text:span text:style-name="T392">2 </text:span><text:span text:style-name="T380">個 </text:span><text:span text:style-name="T392">/25 → 1 </text:span><text:span text:style-name="T380">個 </text:span><text:span text:style-name="T392">/24</text:span><text:span text:style-name="T114">　</text:span><text:span text:style-name="T148">192.168.1</text:span><text:span text:style-name="T158">.0</text:span><text:span text:style-name="T148">/25 </text:span><text:span text:style-name="T99">＋ </text:span><text:span text:style-name="T148">192.168.1</text:span><text:span text:style-name="T158">.128</text:span><text:span text:style-name="T148">/25 → ① </text:span><text:span text:style-name="T99">緊鄰✔ ② </text:span><text:span text:style-name="T148">2 </text:span><text:span text:style-name="T99">個（</text:span><text:span text:style-name="T148">2¹</text:span><text:span text:style-name="T99">）✔ ③ 起點 </text:span><text:span text:style-name="T148">.0</text:span><text:span text:style-name="T99">，</text:span><text:span text:style-name="T148">0÷256=0✔ → </text:span><text:span text:style-name="T99">合併為 </text:span><text:span text:style-name="T148">192.168.1</text:span><text:span text:style-name="T158">.0</text:span><text:span text:style-name="T148">/24</text:span><text:span text:style-name="T99">。</text:span></text:p>
            <text:p text:style-name="P10"><text:span text:style-name="T114">範例：</text:span><text:span text:style-name="T392">4 </text:span><text:span text:style-name="T380">個 </text:span><text:span text:style-name="T392">/24 → 1 </text:span><text:span text:style-name="T380">個 </text:span><text:span text:style-name="T392">/22</text:span><text:span text:style-name="T114">　</text:span><text:span text:style-name="T148">192.168</text:span><text:span text:style-name="T160">.0/1/2/3</text:span><text:span text:style-name="T148">.0/</text:span><text:span text:style-name="T149">24</text:span><text:span text:style-name="T148"> → </text:span><text:span text:style-name="T99">連續✔、</text:span><text:span text:style-name="T148">4 </text:span><text:span text:style-name="T99">個（</text:span><text:span text:style-name="T148">2²</text:span><text:span text:style-name="T99">）✔、對齊✔ → 合併為 </text:span><text:span text:style-name="T148">192.168</text:span><text:span text:style-name="T151">.0</text:span><text:span text:style-name="T148">.0/</text:span><text:span text:style-name="T149">22</text:span><text:span text:style-name="T99">。</text:span></text:p>
            <text:p text:style-name="P10"><text:span text:style-name="T208">反例（無法合併）：</text:span><text:span text:style-name="T462">192.168.1.0/24 </text:span><text:span text:style-name="T447">＋ </text:span><text:span text:style-name="T462">192.168.2.0/24 → </text:span><text:span text:style-name="T447">雖數量為 </text:span><text:span text:style-name="T462">2</text:span><text:span text:style-name="T447">，但起點 </text:span><text:span text:style-name="T462">.1 </text:span><text:span text:style-name="T447">不對齊</text:span><text:span text:style-name="T99">（</text:span><text:span text:style-name="T148">/23 </text:span><text:span text:style-name="T99">起點只能是偶數倍 </text:span><text:span text:style-name="T148">.0 </text:span><text:span text:style-name="T99">或 </text:span><text:span text:style-name="T148">.2</text:span><text:span text:style-name="T99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9"><text:span text:style-name="T227">合併後前綴公式：</text:span><text:span text:style-name="T99">合併 </text:span><text:span text:style-name="T148">2ⁿ </text:span><text:span text:style-name="T99">個子網 → 前綴減 </text:span><text:span text:style-name="T148">n</text:span><text:span text:style-name="T99">（</text:span><text:span text:style-name="T313">每合併一倍，</text:span><text:span text:style-name="T324">/ </text:span><text:span text:style-name="T313">的數字減 </text:span><text:span text:style-name="T324">1</text:span><text:span text:style-name="T99">）。</text:span></text:p>
            <text:p text:style-name="P10" loext:marker-style-name="T101"><text:span text:style-name="T508">2 </text:span><text:span text:style-name="T490">個 </text:span><text:span text:style-name="T508">/26 → /25</text:span><text:span text:style-name="T490">；</text:span><text:span text:style-name="T508">4 </text:span><text:span text:style-name="T490">個 </text:span><text:span text:style-name="T508">/26 → /24</text:span><text:span text:style-name="T490">；</text:span><text:span text:style-name="T508">2 </text:span><text:span text:style-name="T490">個 </text:span><text:span text:style-name="T508">/24 → /23</text:span><text:span text:style-name="T99">。</text:span></text:p>
          </table:table-cell>
        </table:table-row>
      </table:table>
      <text:h text:style-name="P2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6" loext:marker-style-name="T65"><text:span text:style-name="T64">概念</text:span><text:span text:style-name="T65"/></text:p>
            </table:table-cell>
            <table:table-cell table:style-name="表格47.A1" office:value-type="string">
              <text:p text:style-name="P6" loext:marker-style-name="T65"><text:span text:style-name="T64">關鍵字</text:span><text:span text:style-name="T65"/></text:p>
            </table:table-cell>
            <table:table-cell table:style-name="表格47.A1" office:value-type="string">
              <text:p text:style-name="P6" loext:marker-style-name="T65"><text:span text:style-name="T64">核心規則</text:span><text:span text:style-name="T65"/></text:p>
            </table:table-cell>
            <table:table-cell table:style-name="表格47.A1" office:value-type="string">
              <text:p text:style-name="P6" loext:marker-style-name="T65"><text:span text:style-name="T64">比喻</text:span><text:span text:style-name="T65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5" loext:marker-style-name="T78"><text:span text:style-name="T138">IP </text:span><text:span text:style-name="T77">分類</text:span></text:p>
          </table:table-cell>
          <table:table-cell table:style-name="表格47.A2" office:value-type="string">
            <text:p text:style-name="P25" loext:marker-style-name="T78"><text:span text:style-name="T138">A/B/C </text:span><text:span text:style-name="T77">類</text:span></text:p>
          </table:table-cell>
          <table:table-cell table:style-name="表格47.A2" office:value-type="string">
            <text:p text:style-name="P25" loext:marker-style-name="T306"><text:span text:style-name="T304">看第一組數字判斷類別</text:span><text:span text:style-name="T306"/></text:p>
          </table:table-cell>
          <table:table-cell table:style-name="表格47.A2" office:value-type="string">
            <text:p text:style-name="P25" loext:marker-style-name="T78"><text:span text:style-name="T77">土地大小分類</text:span><text:span text:style-name="T78"/></text:p>
          </table:table-cell>
        </table:table-row>
        <table:table-row table:style-name="表格47.1">
          <table:table-cell table:style-name="表格47.A3" office:value-type="string">
            <text:p text:style-name="P25" loext:marker-style-name="T78"><text:span text:style-name="T138">VLSM</text:span><text:span text:style-name="T78"/></text:p>
          </table:table-cell>
          <table:table-cell table:style-name="表格47.A3" office:value-type="string">
            <text:p text:style-name="P25" loext:marker-style-name="T78"><text:span text:style-name="T77">切子網路</text:span><text:span text:style-name="T78"/></text:p>
          </table:table-cell>
          <table:table-cell table:style-name="表格47.A3" office:value-type="string">
            <text:p text:style-name="P25" loext:marker-style-name="T78"><text:span text:style-name="T86">由大到小</text:span><text:span text:style-name="T77">；</text:span><text:span text:style-name="T251">需求</text:span><text:span text:style-name="T241">+2→2ⁿ→/(32−n)</text:span></text:p>
          </table:table-cell>
          <table:table-cell table:style-name="表格47.A3" office:value-type="string">
            <text:p text:style-name="P25" loext:marker-style-name="T78"><text:span text:style-name="T77">把大地切成不同大小的小塊</text:span><text:span text:style-name="T78"/></text:p>
          </table:table-cell>
        </table:table-row>
        <table:table-row table:style-name="表格47.1">
          <table:table-cell table:style-name="表格47.A2" office:value-type="string">
            <text:p text:style-name="P25" loext:marker-style-name="T78"><text:span text:style-name="T138">CIDR </text:span><text:span text:style-name="T77">合併</text:span></text:p>
          </table:table-cell>
          <table:table-cell table:style-name="表格47.A2" office:value-type="string">
            <text:p text:style-name="P25" loext:marker-style-name="T78"><text:span text:style-name="T77">聚合路由</text:span><text:span text:style-name="T78"/></text:p>
          </table:table-cell>
          <table:table-cell table:style-name="表格47.A2" office:value-type="string">
            <text:p text:style-name="P25" loext:marker-style-name="T78"><text:span text:style-name="T304">連續</text:span><text:span text:style-name="T77"> </text:span><text:span text:style-name="T138">+ </text:span><text:span text:style-name="T77">數量 </text:span><text:span text:style-name="T138">2ⁿ + </text:span><text:span text:style-name="T77">對齊；</text:span><text:span text:style-name="T90">前綴減 </text:span><text:span text:style-name="T142">n</text:span></text:p>
          </table:table-cell>
          <table:table-cell table:style-name="表格47.A2" office:value-type="string">
            <text:p text:style-name="P25" loext:marker-style-name="T78"><text:span text:style-name="T77">把相鄰小地合成大地</text:span><text:span text:style-name="T78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8"><text:span text:style-name="T176">🎯 <text:s/></text:span><text:span text:style-name="T217">考試標準解題流程</text:span></text:p>
            <text:p text:style-name="P9"><text:span text:style-name="T218">遇到 </text:span><text:span text:style-name="T221">VLSM </text:span><text:span text:style-name="T218">題：</text:span><text:span text:style-name="T482">確認起始網路</text:span><text:span text:style-name="T99"> → </text:span><text:span text:style-name="T472">需求由大到小</text:span><text:span text:style-name="T99"> → </text:span><text:span text:style-name="T269">各需求 </text:span><text:span text:style-name="T286">+2 </text:span><text:span text:style-name="T269">找 </text:span><text:span text:style-name="T286">2ⁿ </text:span><text:span text:style-name="T269">算前綴</text:span><text:span text:style-name="T99"> → </text:span><text:span text:style-name="T376">大的先切</text:span><text:span text:style-name="T99">依序往後 → </text:span><text:span text:style-name="T446">驗證網路位址</text:span><text:span text:style-name="T463">/</text:span><text:span text:style-name="T446">廣播位址</text:span><text:span text:style-name="T463">/</text:span><text:span text:style-name="T446">可用範圍</text:span><text:span text:style-name="T99">。</text:span></text:p>
            <text:p text:style-name="P10"><text:span text:style-name="T218">遇到 </text:span><text:span text:style-name="T221">CIDR </text:span><text:span text:style-name="T218">合併題：</text:span><text:span text:style-name="T99">列出網路確認連續 → 確認數量 </text:span><text:span text:style-name="T148">2ⁿ → </text:span><text:span text:style-name="T99">確認起點對齊（起點</text:span><text:span text:style-name="T148">÷</text:span><text:span text:style-name="T99">合併後大小</text:span><text:span text:style-name="T148">=</text:span><text:span text:style-name="T99">整數）→ 前綴 </text:span><text:span text:style-name="T148">= </text:span><text:span text:style-name="T99">原前綴 − </text:span><text:span text:style-name="T148">n</text:span><text:span text:style-name="T99">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339">一條網路，一次最多</text:span><text:span text:style-name="T27">)</text:span></text:h>
      <text:p text:style-name="P32" loext:marker-style-name="T101"><text:span text:style-name="T158">MTU</text:span><text:span text:style-name="T148"> </text:span><text:span text:style-name="T99">＝ </text:span><text:span text:style-name="T464">Maximum Transmission Unit</text:span><text:span text:style-name="T448">，</text:span><text:span text:style-name="T270">一條網路</text:span><text:span text:style-name="T448">「</text:span><text:span text:style-name="T410">一次最多</text:span><text:span text:style-name="T448">能傳送的</text:span><text:span text:style-name="T337">封包大小</text:span><text:span text:style-name="T448">」</text:span><text:span text:style-name="T99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6" loext:marker-style-name="T65"><text:span text:style-name="T64">網路類型</text:span><text:span text:style-name="T65"/></text:p>
            </table:table-cell>
            <table:table-cell table:style-name="表格48.A1" office:value-type="string">
              <text:p text:style-name="P6" loext:marker-style-name="T65"><text:span text:style-name="T74">MTU </text:span><text:span text:style-name="T64">值</text:span></text:p>
            </table:table-cell>
            <table:table-cell table:style-name="表格48.A1" office:value-type="string">
              <text:p text:style-name="P6" loext:marker-style-name="T65"><text:span text:style-name="T64">說明</text:span><text:span text:style-name="T65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5" loext:marker-style-name="T78"><text:span text:style-name="T138">Ethernet</text:span><text:span text:style-name="T77">（乙太網）</text:span></text:p>
          </table:table-cell>
          <table:table-cell table:style-name="表格48.A2" office:value-type="string">
            <text:p text:style-name="P25" loext:marker-style-name="T78"><text:span text:style-name="T138">1500 bytes</text:span><text:span text:style-name="T78"/></text:p>
          </table:table-cell>
          <table:table-cell table:style-name="表格48.A2" office:value-type="string">
            <text:p text:style-name="P25" loext:marker-style-name="T78"><text:span text:style-name="T77">最常見，</text:span><text:span text:style-name="T138">99% </text:span><text:span text:style-name="T77">環境</text:span></text:p>
          </table:table-cell>
        </table:table-row>
        <table:table-row table:style-name="表格48.1">
          <table:table-cell table:style-name="表格48.A3" office:value-type="string">
            <text:p text:style-name="P25" loext:marker-style-name="T78"><text:span text:style-name="T138">Wi-Fi (802.11)</text:span><text:span text:style-name="T78"/></text:p>
          </table:table-cell>
          <table:table-cell table:style-name="表格48.A3" office:value-type="string">
            <text:p text:style-name="P25" loext:marker-style-name="T78"><text:span text:style-name="T138">2304 bytes</text:span><text:span text:style-name="T78"/></text:p>
          </table:table-cell>
          <table:table-cell table:style-name="表格48.A3" office:value-type="string">
            <text:p text:style-name="P25" loext:marker-style-name="T78"><text:span text:style-name="T77">無線區域網路</text:span><text:span text:style-name="T78"/></text:p>
          </table:table-cell>
        </table:table-row>
        <table:table-row table:style-name="表格48.1">
          <table:table-cell table:style-name="表格48.A2" office:value-type="string">
            <text:p text:style-name="P25" loext:marker-style-name="T78"><text:span text:style-name="T138">PPPoE</text:span><text:span text:style-name="T77">（</text:span><text:span text:style-name="T138">ADSL</text:span><text:span text:style-name="T77">）</text:span></text:p>
          </table:table-cell>
          <table:table-cell table:style-name="表格48.A2" office:value-type="string">
            <text:p text:style-name="P25" loext:marker-style-name="T78"><text:span text:style-name="T138">1492 bytes</text:span><text:span text:style-name="T78"/></text:p>
          </table:table-cell>
          <table:table-cell table:style-name="表格48.A2" office:value-type="string">
            <text:p text:style-name="P25" loext:marker-style-name="T78"><text:span text:style-name="T77">需扣掉 </text:span><text:span text:style-name="T138">PPPoE header</text:span></text:p>
          </table:table-cell>
        </table:table-row>
        <table:table-row table:style-name="表格48.1">
          <table:table-cell table:style-name="表格48.A3" office:value-type="string">
            <text:p text:style-name="P25" loext:marker-style-name="T78"><text:span text:style-name="T138">Loopback</text:span><text:span text:style-name="T77">（本機）</text:span></text:p>
          </table:table-cell>
          <table:table-cell table:style-name="表格48.A3" office:value-type="string">
            <text:p text:style-name="P25" loext:marker-style-name="T78"><text:span text:style-name="T138">65536 bytes</text:span><text:span text:style-name="T78"/></text:p>
          </table:table-cell>
          <table:table-cell table:style-name="表格48.A3" office:value-type="string">
            <text:p text:style-name="P25" loext:marker-style-name="T78"><text:span text:style-name="T77">本機內部通訊</text:span><text:span text:style-name="T78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8"><text:span text:style-name="T176">❗ <text:s/></text:span><text:span text:style-name="T198">重點</text:span></text:p>
            <text:p text:style-name="P9" loext:marker-style-name="T101"><text:span text:style-name="T313">若封包大小 </text:span><text:span text:style-name="T324">&gt; MTU</text:span><text:span text:style-name="T313">，就必須「切開」才能傳送</text:span><text:span text:style-name="T99">，這個動作就叫 </text:span><text:span text:style-name="T477">Fragmentation</text:span><text:span text:style-name="T482">（分段）</text:span><text:span text:style-name="T99">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8"><text:span text:style-name="T176">📦 <text:s/></text:span><text:span text:style-name="T47">怎麼切？</text:span></text:p>
            <text:p text:style-name="P9" loext:marker-style-name="T101"><text:span text:style-name="T99">範例：送出 </text:span><text:span text:style-name="T148">4000 bytes</text:span><text:span text:style-name="T99">、</text:span><text:span text:style-name="T160">MTU = 1500</text:span><text:span text:style-name="T99">（</text:span><text:span text:style-name="T266">每段扣掉 </text:span><text:span text:style-name="T283">20 bytes IP Header</text:span><text:span text:style-name="T99">，</text:span><text:span text:style-name="T115">剩 </text:span><text:span text:style-name="T158">1480 </text:span><text:span text:style-name="T115">可放資料</text:span><text:span text:style-name="T99">）</text:span></text:p>
            <text:p text:style-name="P10" loext:marker-style-name="T336"><text:span text:style-name="T335">第 </text:span><text:span text:style-name="T342">1 </text:span><text:span text:style-name="T335">段：</text:span><text:span text:style-name="T342">1480 bytes</text:span><text:span text:style-name="T335">｜第 </text:span><text:span text:style-name="T342">2 </text:span><text:span text:style-name="T335">段：</text:span><text:span text:style-name="T342">1480 bytes</text:span><text:span text:style-name="T335">｜第 </text:span><text:span text:style-name="T342">3 </text:span><text:span text:style-name="T335">段：</text:span><text:span text:style-name="T342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6" loext:marker-style-name="T65"><text:span text:style-name="T64">版本</text:span><text:span text:style-name="T65"/></text:p>
          </table:table-cell>
          <table:table-cell table:style-name="表格49.A2" office:value-type="string">
            <text:p text:style-name="P6" loext:marker-style-name="T65"><text:span text:style-name="T64">誰負責分段</text:span><text:span text:style-name="T65"/></text:p>
          </table:table-cell>
          <table:table-cell table:style-name="表格49.A2" office:value-type="string">
            <text:p text:style-name="P6" loext:marker-style-name="T65"><text:span text:style-name="T74">Router </text:span><text:span text:style-name="T64">可切？</text:span></text:p>
          </table:table-cell>
          <table:table-cell table:style-name="表格49.A2" office:value-type="string">
            <text:p text:style-name="P6" loext:marker-style-name="T65"><text:span text:style-name="T64">說明</text:span><text:span text:style-name="T65"/></text:p>
          </table:table-cell>
        </table:table-row>
        <table:table-row table:style-name="表格49.1">
          <table:table-cell table:style-name="表格49.A3" office:value-type="string">
            <text:p text:style-name="P25" loext:marker-style-name="T79"><text:span text:style-name="T139">IPv4</text:span><text:span text:style-name="T79"/></text:p>
          </table:table-cell>
          <table:table-cell table:style-name="表格49.A3" office:value-type="string">
            <text:p text:style-name="P25" loext:marker-style-name="T78"><text:span text:style-name="T138">Router </text:span><text:span text:style-name="T77">或 </text:span><text:span text:style-name="T138">Source</text:span></text:p>
          </table:table-cell>
          <table:table-cell table:style-name="表格49.A3" office:value-type="string">
            <text:p text:style-name="P25" loext:marker-style-name="T220"><text:span text:style-name="T222">✅ </text:span><text:span text:style-name="T219">可以</text:span></text:p>
          </table:table-cell>
          <table:table-cell table:style-name="表格49.A3" office:value-type="string">
            <text:p text:style-name="P25" loext:marker-style-name="T402"><text:span text:style-name="T401">封包到 </text:span><text:span text:style-name="T397">Router </text:span><text:span text:style-name="T401">太大時，</text:span><text:span text:style-name="T397">Router </text:span><text:span text:style-name="T401">直接幫你切</text:span></text:p>
          </table:table-cell>
        </table:table-row>
        <table:table-row table:style-name="表格49.1">
          <table:table-cell table:style-name="表格49.A4" office:value-type="string">
            <text:p text:style-name="P25" loext:marker-style-name="T79"><text:span text:style-name="T139">IPv6</text:span><text:span text:style-name="T79"/></text:p>
          </table:table-cell>
          <table:table-cell table:style-name="表格49.A4" office:value-type="string">
            <text:p text:style-name="P25" loext:marker-style-name="T78"><text:span text:style-name="T77">僅 </text:span><text:span text:style-name="T138">Source</text:span><text:span text:style-name="T77">（送端）</text:span></text:p>
          </table:table-cell>
          <table:table-cell table:style-name="表格49.A4" office:value-type="string">
            <text:p text:style-name="P25" loext:marker-style-name="T206"><text:span text:style-name="T211">❌ </text:span><text:span text:style-name="T205">不行</text:span></text:p>
          </table:table-cell>
          <table:table-cell table:style-name="表格49.A4" office:value-type="string">
            <text:p text:style-name="P25" loext:marker-style-name="T78"><text:span text:style-name="T514">Router </text:span><text:span text:style-name="T496">不分段</text:span><text:span text:style-name="T77">，</text:span><text:span text:style-name="T399">由送端自行處理</text:span><text:span text:style-name="T77">，搭配 </text:span><text:span text:style-name="T138">PMTUD</text:span></text:p>
          </table:table-cell>
        </table:table-row>
      </table:table>
      <text:h text:style-name="P2" text:outline-level="2" loext:marker-style-name="T27"><text:span text:style-name="T28">拾、</text:span><text:span text:style-name="T27">IP Header </text:span><text:span text:style-name="T28">關鍵欄位</text:span></text:h>
      <text:p text:style-name="P32" loext:marker-style-name="T101"><text:span text:style-name="T99">每個封包都有一個「說明書」（</text:span><text:span text:style-name="T148">IP Header</text:span><text:span text:style-name="T99">），無選項時長度固定 </text:span><text:span text:style-name="T148">20 bytes</text:span><text:span text:style-name="T99">。最重要的 </text:span><text:span text:style-name="T148">5 </text:span><text:span text:style-name="T99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9"><text:span text:style-name="T60">(1) </text:span><text:span text:style-name="T59">Total Length</text:span><text:span text:style-name="T51">：</text:span><text:span text:style-name="T99">封包總大小（</text:span><text:span text:style-name="T148">Header + Data</text:span><text:span text:style-name="T99">），最大 </text:span><text:span text:style-name="T148">65535 bytes</text:span><text:span text:style-name="T99">（</text:span><text:span text:style-name="T148">16 bits</text:span><text:span text:style-name="T99">）。</text:span></text:p>
            <text:p text:style-name="P10"><text:span text:style-name="T60">(2) </text:span><text:span text:style-name="T59">Identification</text:span><text:span text:style-name="T51">：</text:span><text:span text:style-name="T266">同一原始封包的所有分段共用同一 </text:span><text:span text:style-name="T283">ID</text:span><text:span text:style-name="T99">；</text:span><text:span text:style-name="T381">接收端靠此 </text:span><text:span text:style-name="T393">ID </text:span><text:span text:style-name="T381">判斷哪些 </text:span><text:span text:style-name="T393">fragment </text:span><text:span text:style-name="T381">要拼在一起</text:span><text:span text:style-name="T99">。</text:span></text:p>
            <text:p text:style-name="P10"><text:span text:style-name="T60">(3) </text:span><text:span text:style-name="T59">Fragment Offset</text:span><text:span text:style-name="T51">：</text:span><text:span text:style-name="T313">這段資料在原始封包中的「起始位置」</text:span><text:span text:style-name="T99">。⚠️ 單位是 </text:span><text:span text:style-name="T148">8 bytes</text:span><text:span text:style-name="T99">（欄位僅 </text:span><text:span text:style-name="T148">13 bits</text:span><text:span text:style-name="T99">）→ </text:span><text:span text:style-name="T324">Offset = </text:span><text:span text:style-name="T313">起始位置 </text:span><text:span text:style-name="T324">÷ 8</text:span><text:span text:style-name="T99">。</text:span></text:p>
            <text:p text:style-name="P10"><text:span text:style-name="T60">(4) </text:span><text:span text:style-name="T59">TTL</text:span><text:span text:style-name="T51">：</text:span><text:span text:style-name="T491">最多可經過幾個 </text:span><text:span text:style-name="T509">Router</text:span><text:span text:style-name="T491">；每經過一個 −</text:span><text:span text:style-name="T509">1</text:span><text:span text:style-name="T99">，</text:span><text:span text:style-name="T446">歸零時 </text:span><text:span text:style-name="T463">Router </text:span><text:span text:style-name="T446">丟棄並回 </text:span><text:span text:style-name="T463">ICMP</text:span><text:span text:style-name="T446">「</text:span><text:span text:style-name="T463">Time Exceeded</text:span><text:span text:style-name="T446">」</text:span><text:span text:style-name="T99">。常見初始值 </text:span><text:span text:style-name="T148">Linux=64</text:span><text:span text:style-name="T99">、</text:span><text:span text:style-name="T148">Windows=128</text:span><text:span text:style-name="T99">。</text:span><text:span text:style-name="T148">traceroute </text:span><text:span text:style-name="T99">即利用 </text:span><text:span text:style-name="T148">TTL</text:span><text:span text:style-name="T99">。</text:span></text:p>
            <text:p text:style-name="P10"><text:span text:style-name="T60">(5) </text:span><text:span text:style-name="T59">Protocol</text:span><text:span text:style-name="T51">：</text:span><text:span text:style-name="T99">告訴 </text:span><text:span text:style-name="T148">OS </text:span><text:span text:style-name="T99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6" loext:marker-style-name="T65"><text:span text:style-name="T64">計算範例（</text:span><text:span text:style-name="T74">MTU=1500, Header=20, </text:span><text:span text:style-name="T64">資料</text:span><text:span text:style-name="T74">=4000</text:span><text:span text:style-name="T64">）</text:span></text:p>
          </table:table-cell>
          <table:covered-table-cell/>
          <table:covered-table-cell/>
          <table:table-cell table:style-name="表格50.A2" office:value-type="string">
            <text:p text:style-name="P6" loext:marker-style-name="T65"><text:span text:style-name="T74">Offset </text:span><text:span text:style-name="T64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5" loext:marker-style-name="T78"><text:span text:style-name="T77">第 </text:span><text:span text:style-name="T138">1 </text:span><text:span text:style-name="T77">段：資料 </text:span><text:span text:style-name="T138">1480 bytes</text:span></text:p>
          </table:table-cell>
          <table:covered-table-cell/>
          <table:covered-table-cell/>
          <table:table-cell table:style-name="表格50.A3" office:value-type="string">
            <text:p text:style-name="P25" loext:marker-style-name="T79"><text:span text:style-name="T139">0 ÷ 8 = 0</text:span><text:span text:style-name="T79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5" loext:marker-style-name="T78"><text:span text:style-name="T77">第 </text:span><text:span text:style-name="T138">2 </text:span><text:span text:style-name="T77">段：資料 </text:span><text:span text:style-name="T138">1480 bytes</text:span></text:p>
          </table:table-cell>
          <table:covered-table-cell/>
          <table:covered-table-cell/>
          <table:table-cell table:style-name="表格50.A4" office:value-type="string">
            <text:p text:style-name="P25" loext:marker-style-name="T78"><text:span text:style-name="T139">1480 ÷ 8 </text:span><text:span text:style-name="T138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5" loext:marker-style-name="T78"><text:span text:style-name="T77">第 </text:span><text:span text:style-name="T138">3 </text:span><text:span text:style-name="T77">段：資料 </text:span><text:span text:style-name="T138">1040 bytes</text:span></text:p>
          </table:table-cell>
          <table:covered-table-cell/>
          <table:covered-table-cell/>
          <table:table-cell table:style-name="表格50.A3" office:value-type="string">
            <text:p text:style-name="P25" loext:marker-style-name="T78"><text:span text:style-name="T139">2960 ÷ 8</text:span><text:span text:style-name="T138"> = 370</text:span></text:p>
          </table:table-cell>
        </table:table-row>
        <table:table-row table:style-name="表格50.1">
          <table:table-cell table:style-name="表格50.A2" office:value-type="string">
            <text:p text:style-name="P22" loext:marker-style-name="T65"><text:span text:style-name="T74">Protocol </text:span><text:span text:style-name="T64">值</text:span></text:p>
          </table:table-cell>
          <table:table-cell table:style-name="表格50.A2" office:value-type="string">
            <text:p text:style-name="P22" loext:marker-style-name="T65"><text:span text:style-name="T64">對應協定</text:span><text:span text:style-name="T65"/></text:p>
          </table:table-cell>
          <table:table-cell table:style-name="表格50.A2" table:number-columns-spanned="2" office:value-type="string">
            <text:p text:style-name="P22" loext:marker-style-name="T65"><text:span text:style-name="T64">常見用途</text:span><text:span text:style-name="T65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5" loext:marker-style-name="T78"><text:span text:style-name="T138">1</text:span><text:span text:style-name="T78"/></text:p>
          </table:table-cell>
          <table:table-cell table:style-name="表格50.A3" office:value-type="string">
            <text:p text:style-name="P25" loext:marker-style-name="T92"><text:span text:style-name="T143">ICMP</text:span><text:span text:style-name="T92"/></text:p>
          </table:table-cell>
          <table:table-cell table:style-name="表格50.A3" table:number-columns-spanned="2" office:value-type="string">
            <text:p text:style-name="P25" loext:marker-style-name="T333"><text:span text:style-name="T344">ping</text:span><text:span text:style-name="T332">、</text:span><text:span text:style-name="T344">TTL </text:span><text:span text:style-name="T332">超時通知、</text:span><text:span text:style-name="T344">Fragmentation </text:span><text:span text:style-name="T332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5" loext:marker-style-name="T78"><text:span text:style-name="T138">6</text:span><text:span text:style-name="T78"/></text:p>
          </table:table-cell>
          <table:table-cell table:style-name="表格50.A4" office:value-type="string">
            <text:p text:style-name="P25" loext:marker-style-name="T78"><text:span text:style-name="T138">TCP</text:span><text:span text:style-name="T78"/></text:p>
          </table:table-cell>
          <table:table-cell table:style-name="表格50.A4" table:number-columns-spanned="2" office:value-type="string">
            <text:p text:style-name="P25" loext:marker-style-name="T78"><text:span text:style-name="T138">HTTP</text:span><text:span text:style-name="T77">、</text:span><text:span text:style-name="T138">HTTPS</text:span><text:span text:style-name="T77">、</text:span><text:span text:style-name="T138">SSH</text:span><text:span text:style-name="T77">、</text:span><text:span text:style-name="T138">FTP </text:span><text:span text:style-name="T77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5" loext:marker-style-name="T78"><text:span text:style-name="T138">17</text:span><text:span text:style-name="T78"/></text:p>
          </table:table-cell>
          <table:table-cell table:style-name="表格50.A3" office:value-type="string">
            <text:p text:style-name="P25" loext:marker-style-name="T78"><text:span text:style-name="T138">UDP</text:span><text:span text:style-name="T78"/></text:p>
          </table:table-cell>
          <table:table-cell table:style-name="表格50.A3" table:number-columns-spanned="2" office:value-type="string">
            <text:p text:style-name="P25" loext:marker-style-name="T78"><text:span text:style-name="T138">DNS</text:span><text:span text:style-name="T77">、</text:span><text:span text:style-name="T138">DHCP</text:span><text:span text:style-name="T77">、影音串流等速度優先</text:span></text:p>
          </table:table-cell>
          <table:covered-table-cell/>
        </table:table-row>
      </table:table>
      <text:h text:style-name="P2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6" loext:marker-style-name="T65"><text:span text:style-name="T74">Flag</text:span><text:span text:style-name="T65"/></text:p>
            </table:table-cell>
            <table:table-cell table:style-name="表格51.A1" office:value-type="string">
              <text:p text:style-name="P6" loext:marker-style-name="T65"><text:span text:style-name="T64">全名</text:span><text:span text:style-name="T65"/></text:p>
            </table:table-cell>
            <table:table-cell table:style-name="表格51.A1" office:value-type="string">
              <text:p text:style-name="P6" loext:marker-style-name="T65"><text:span text:style-name="T64">值 </text:span><text:span text:style-name="T74">= 1 </text:span><text:span text:style-name="T64">代表</text:span></text:p>
            </table:table-cell>
            <table:table-cell table:style-name="表格51.A1" office:value-type="string">
              <text:p text:style-name="P6" loext:marker-style-name="T65"><text:span text:style-name="T64">值 </text:span><text:span text:style-name="T74">= 0 </text:span><text:span text:style-name="T64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5" loext:marker-style-name="T306"><text:span text:style-name="T299">DF</text:span><text:span text:style-name="T306"/></text:p>
          </table:table-cell>
          <table:table-cell table:style-name="表格51.A2" office:value-type="string">
            <text:p text:style-name="P25" loext:marker-style-name="T306"><text:span text:style-name="T299">Don't Fragment</text:span><text:span text:style-name="T306"/></text:p>
          </table:table-cell>
          <table:table-cell table:style-name="表格51.A2" office:value-type="string">
            <text:p text:style-name="P25" loext:marker-style-name="T78"><text:span text:style-name="T138">❌ </text:span><text:span text:style-name="T77">不准切！超大就丟並回 </text:span><text:span text:style-name="T138">ICMP</text:span></text:p>
          </table:table-cell>
          <table:table-cell table:style-name="表格51.A2" office:value-type="string">
            <text:p text:style-name="P25" loext:marker-style-name="T78"><text:span text:style-name="T77">允許分段（一般封包）</text:span><text:span text:style-name="T78"/></text:p>
          </table:table-cell>
        </table:table-row>
        <table:table-row table:style-name="表格51.1">
          <table:table-cell table:style-name="表格51.A3" office:value-type="string">
            <text:p text:style-name="P25" loext:marker-style-name="T252"><text:span text:style-name="T241">MF</text:span><text:span text:style-name="T252"/></text:p>
          </table:table-cell>
          <table:table-cell table:style-name="表格51.A3" office:value-type="string">
            <text:p text:style-name="P25" loext:marker-style-name="T252"><text:span text:style-name="T241">More Fragments</text:span><text:span text:style-name="T252"/></text:p>
          </table:table-cell>
          <table:table-cell table:style-name="表格51.A3" office:value-type="string">
            <text:p text:style-name="P25" loext:marker-style-name="T78"><text:span text:style-name="T77">後面還有更多分段</text:span><text:span text:style-name="T78"/></text:p>
          </table:table-cell>
          <table:table-cell table:style-name="表格51.A3" office:value-type="string">
            <text:p text:style-name="P25" loext:marker-style-name="T78"><text:span text:style-name="T77">這是最後一段（或未分段）</text:span><text:span text:style-name="T78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8"><text:span text:style-name="T176">▸ <text:s/></text:span><text:span text:style-name="T58">DF = 1 </text:span><text:span text:style-name="T47">的完整流程</text:span></text:p>
            <text:p text:style-name="P9" loext:marker-style-name="T101"><text:span text:style-name="T148">① </text:span><text:span text:style-name="T99">送出封包（</text:span><text:span text:style-name="T158">DF=1</text:span><text:span text:style-name="T115">，不准切</text:span><text:span text:style-name="T99">）→ ② 到某 </text:span><text:span text:style-name="T148">Router</text:span><text:span text:style-name="T99">，發現</text:span><text:span text:style-name="T265">封包 </text:span><text:span text:style-name="T287">&gt; </text:span><text:span text:style-name="T265">該路段 </text:span><text:span text:style-name="T287">MTU</text:span><text:span text:style-name="T148"> → ③ </text:span><text:span text:style-name="T416">Router </text:span><text:span text:style-name="T406">不能切，直接丟棄 </text:span><text:span text:style-name="T99">→ ④ </text:span><text:span text:style-name="T509">Router </text:span><text:span text:style-name="T491">回傳 </text:span><text:span text:style-name="T509">ICMP</text:span><text:span text:style-name="T491">「</text:span><text:span text:style-name="T509">Fragmentation Needed</text:span><text:span text:style-name="T491">」（含可用 </text:span><text:span text:style-name="T509">MTU </text:span><text:span text:style-name="T491">大小）</text:span><text:span text:style-name="T99">→ ⑤ </text:span><text:span text:style-name="T266">送端調整封包大小後</text:span><text:span text:style-name="T449">重送</text:span><text:span text:style-name="T99">。這就是 </text:span><text:span text:style-name="T160">PMTUD </text:span><text:span text:style-name="T117">的核心機制</text:span><text:span text:style-name="T99">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32" loext:marker-style-name="T101"><text:span text:style-name="T158">PMTUD </text:span><text:span text:style-name="T99">＝</text:span><text:span text:style-name="T449"> </text:span><text:span text:style-name="T465">Path MTU Discovery</text:span><text:span text:style-name="T449">，自動找出</text:span><text:span text:style-name="T542">來源到目的地</text:span><text:span text:style-name="T449">整條路徑中</text:span><text:span text:style-name="T492">最小的 </text:span><text:span text:style-name="T510">MTU </text:span><text:span text:style-name="T492">值</text:span><text:span text:style-name="T99">。</text:span><text:span text:style-name="T120">網路路徑可能途經不同網路</text:span><text:span text:style-name="T99">（</text:span><text:span text:style-name="T148">Ethernet → PPPoE → Wi-Fi</text:span><text:span text:style-name="T99">），封包必須符合「最小的那個 </text:span><text:span text:style-name="T148">MTU</text:span><text:span text:style-name="T99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6" loext:marker-style-name="T65"><text:span text:style-name="T64">版本</text:span><text:span text:style-name="T65"/></text:p>
            </table:table-cell>
            <table:table-cell table:style-name="表格52.A1" office:value-type="string">
              <text:p text:style-name="P6" loext:marker-style-name="T65"><text:span text:style-name="T74">Router </text:span><text:span text:style-name="T64">可分段？</text:span></text:p>
            </table:table-cell>
            <table:table-cell table:style-name="表格52.A1" office:value-type="string">
              <text:p text:style-name="P6" loext:marker-style-name="T65"><text:span text:style-name="T74">PMTUD </text:span><text:span text:style-name="T64">必要性</text:span></text:p>
            </table:table-cell>
            <table:table-cell table:style-name="表格52.A1" office:value-type="string">
              <text:p text:style-name="P6" loext:marker-style-name="T65"><text:span text:style-name="T74">Router </text:span><text:span text:style-name="T64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5" loext:marker-style-name="T91"><text:span text:style-name="T142">IPv4</text:span><text:span text:style-name="T91"/></text:p>
          </table:table-cell>
          <table:table-cell table:style-name="表格52.A2" office:value-type="string">
            <text:p text:style-name="P25" loext:marker-style-name="T87"><text:span text:style-name="T144">✅ </text:span><text:span text:style-name="T86">可以（但不推薦）</text:span></text:p>
          </table:table-cell>
          <table:table-cell table:style-name="表格52.A2" office:value-type="string">
            <text:p text:style-name="P25" loext:marker-style-name="T78"><text:span text:style-name="T77">可選，但建議使用</text:span><text:span text:style-name="T78"/></text:p>
          </table:table-cell>
          <table:table-cell table:style-name="表格52.A2" office:value-type="string">
            <text:p text:style-name="P25" loext:marker-style-name="T78"><text:span text:style-name="T138">ICMP Fragmentation Needed</text:span><text:span text:style-name="T78"/></text:p>
          </table:table-cell>
        </table:table-row>
        <table:table-row table:style-name="表格52.1">
          <table:table-cell table:style-name="表格52.A3" office:value-type="string">
            <text:p text:style-name="P25" loext:marker-style-name="T91"><text:span text:style-name="T142">IPv6</text:span><text:span text:style-name="T91"/></text:p>
          </table:table-cell>
          <table:table-cell table:style-name="表格52.A3" office:value-type="string">
            <text:p text:style-name="P25" loext:marker-style-name="T87"><text:span text:style-name="T144">❌ </text:span><text:span text:style-name="T86">不行</text:span></text:p>
          </table:table-cell>
          <table:table-cell table:style-name="表格52.A3" office:value-type="string">
            <text:p text:style-name="P25" loext:marker-style-name="T78"><text:span text:style-name="T138">⚠️ </text:span><text:span text:style-name="T77">必須使用</text:span></text:p>
          </table:table-cell>
          <table:table-cell table:style-name="表格52.A3" office:value-type="string">
            <text:p text:style-name="P25" loext:marker-style-name="T78"><text:span text:style-name="T138">ICMPv6 Packet Too Big</text:span><text:span text:style-name="T78"/></text:p>
          </table:table-cell>
        </table:table-row>
      </table:table>
      <text:h text:style-name="P2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32" loext:marker-style-name="T101"><text:span text:style-name="T324">TCP </text:span><text:span text:style-name="T313">不依賴 </text:span><text:span text:style-name="T324">IP </text:span><text:span text:style-name="T313">層切封包，而是「自己先控制好大小」</text:span><text:span text:style-name="T99">，</text:span><text:span text:style-name="T115">讓 </text:span><text:span text:style-name="T158">IP </text:span><text:span text:style-name="T115">層根本不需要切</text:span><text:span text:style-name="T99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><text:span text:style-name="T60">MSS</text:span><text:span text:style-name="T51">（</text:span><text:span text:style-name="T60">Maximum Segment Size</text:span><text:span text:style-name="T51">）：</text:span><text:span text:style-name="T288">MSS = MTU − IP Header − TCP Header </text:span><text:span text:style-name="T148">= </text:span><text:span text:style-name="T158">1500 − 20 − 20 = 1460 bytes</text:span><text:span text:style-name="T99">。</text:span><text:span text:style-name="T411">三向交握時雙方各自宣告 </text:span><text:span text:style-name="T417">MSS</text:span><text:span text:style-name="T411">，之後每段 ≤ </text:span><text:span text:style-name="T417">MSS</text:span><text:span text:style-name="T99">，</text:span><text:span text:style-name="T115">讓 </text:span><text:span text:style-name="T158">IP </text:span><text:span text:style-name="T115">層不需分段</text:span><text:span text:style-name="T99">。</text:span></text:p>
            <text:p text:style-name="P10"><text:span text:style-name="T51">搭配 </text:span><text:span text:style-name="T60">DF=1 + PMTUD</text:span><text:span text:style-name="T51">：</text:span><text:span text:style-name="T148">TCP </text:span><text:span text:style-name="T99">連線設 </text:span><text:span text:style-name="T148">DF=1 </text:span><text:span text:style-name="T99">禁止 </text:span><text:span text:style-name="T148">Router </text:span><text:span text:style-name="T99">分段；</text:span><text:span text:style-name="T266">若收到 </text:span><text:span text:style-name="T283">ICMP</text:span><text:span text:style-name="T266">「</text:span><text:span text:style-name="T283">Fragmentation Needed</text:span><text:span text:style-name="T266">」，自動調低 </text:span><text:span text:style-name="T283">MSS </text:span><text:span text:style-name="T266">重試</text:span><text:span text:style-name="T99">，最終找到整條路徑都能通過的最佳 </text:span><text:span text:style-name="T148">MSS</text:span><text:span text:style-name="T99">。</text:span></text:p>
          </table:table-cell>
        </table:table-row>
        <table:table-row table:style-name="表格53.1">
          <table:table-cell table:style-name="表格53.A2" office:value-type="string">
            <text:p text:style-name="P8"><text:span text:style-name="T176">✅ <text:s/></text:span><text:span text:style-name="T217">結論</text:span></text:p>
            <text:p text:style-name="P9" loext:marker-style-name="T101"><text:span text:style-name="T477">TCP = </text:span><text:span text:style-name="T482">主動控制大小（</text:span><text:span text:style-name="T477">MSS</text:span><text:span text:style-name="T482">）＋ </text:span><text:span text:style-name="T477">DF=1 </text:span><text:span text:style-name="T482">＋ </text:span><text:span text:style-name="T477">PMTUD</text:span><text:span text:style-name="T99">，</text:span><text:span text:style-name="T271">從源頭就避免 </text:span><text:span text:style-name="T288">Fragmentation </text:span><text:span text:style-name="T271">發生</text:span><text:span text:style-name="T99">。</text:span><text:span text:style-name="T393">TCP </text:span><text:span text:style-name="T381">做 </text:span><text:span text:style-name="T393">Segmentation </text:span><text:span text:style-name="T381">的主要目的之一，就是讓每個封包符合 </text:span><text:span text:style-name="T393">MTU</text:span><text:span text:style-name="T99">，從而避免 </text:span><text:span text:style-name="T148">IP </text:span><text:span text:style-name="T99">再做 </text:span><text:span text:style-name="T148">Fragmentation</text:span><text:span text:style-name="T99">。</text:span></text:p>
          </table:table-cell>
        </table:table-row>
      </table:table>
      <text:h text:style-name="P2" text:outline-level="2" loext:marker-style-name="T27"><text:span text:style-name="T28">拾肆、</text:span><text:span text:style-name="T27">Fragmentation DoS </text:span><text:span text:style-name="T28">攻擊</text:span></text:h>
      <text:p text:style-name="P32" loext:marker-style-name="T101"><text:span text:style-name="T266">攻擊者利用「接收端重組封包很耗資源」這個特性</text:span><text:span text:style-name="T99">，</text:span><text:span text:style-name="T313">刻意製造大量異常 </text:span><text:span text:style-name="T324">Fragment</text:span><text:span text:style-name="T99">。正常重組流程：收到 </text:span><text:span text:style-name="T148">Fragment </text:span><text:span text:style-name="T448">放入緩衝區 </text:span><text:span text:style-name="T99">→ </text:span><text:span text:style-name="T491">等同一 </text:span><text:span text:style-name="T509">ID </text:span><text:span text:style-name="T491">的所有 </text:span><text:span text:style-name="T509">Fragment </text:span><text:span text:style-name="T491">到齊 → 依</text:span><text:span text:style-name="T315"> </text:span><text:span text:style-name="T326">Offset </text:span><text:span text:style-name="T491">排序 → 拼回原始封包</text:span><text:span text:style-name="T99">；每步都消耗 </text:span><text:span text:style-name="T148">RAM </text:span><text:span text:style-name="T99">與 </text:span><text:span text:style-name="T148">CPU</text:span><text:span text:style-name="T99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6" loext:marker-style-name="T71"><text:span text:style-name="T70">攻擊手法</text:span><text:span text:style-name="T71"/></text:p>
            </table:table-cell>
            <table:table-cell table:style-name="表格54.A1" office:value-type="string">
              <text:p text:style-name="P6" loext:marker-style-name="T71"><text:span text:style-name="T70">做法</text:span><text:span text:style-name="T71"/></text:p>
            </table:table-cell>
            <table:table-cell table:style-name="表格54.A1" office:value-type="string">
              <text:p text:style-name="P6" loext:marker-style-name="T71"><text:span text:style-name="T70">後果</text:span><text:span text:style-name="T71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5" loext:marker-style-name="T132"><text:span text:style-name="T171">1 </text:span><text:span text:style-name="T131">不完整 </text:span><text:span text:style-name="T171">Fragment</text:span></text:p>
          </table:table-cell>
          <table:table-cell table:style-name="表格54.A2" office:value-type="string">
            <text:p text:style-name="P25" loext:marker-style-name="T129"><text:span text:style-name="T130">只送部分分段（缺其中一段）</text:span><text:span text:style-name="T129"/></text:p>
          </table:table-cell>
          <table:table-cell table:style-name="表格54.A2" office:value-type="string">
            <text:p text:style-name="P25" loext:marker-style-name="T129"><text:span text:style-name="T130">接收端一直等待不敢丟棄 → </text:span><text:span text:style-name="T170">RAM </text:span><text:span text:style-name="T130">持續被占用</text:span></text:p>
          </table:table-cell>
        </table:table-row>
        <table:table-row table:style-name="表格54.1">
          <table:table-cell table:style-name="表格54.A3" office:value-type="string">
            <text:p text:style-name="P25" loext:marker-style-name="T132"><text:span text:style-name="T171">2 Offset </text:span><text:span text:style-name="T131">重疊</text:span></text:p>
          </table:table-cell>
          <table:table-cell table:style-name="表格54.A3" office:value-type="string">
            <text:p text:style-name="P25" loext:marker-style-name="T129"><text:span text:style-name="T130">送出 </text:span><text:span text:style-name="T170">Offset </text:span><text:span text:style-name="T130">互相重疊的 </text:span><text:span text:style-name="T170">Fragment</text:span></text:p>
          </table:table-cell>
          <table:table-cell table:style-name="表格54.A3" office:value-type="string">
            <text:p text:style-name="P25" loext:marker-style-name="T129"><text:span text:style-name="T133">接收端須判斷哪個才是正確資料 </text:span><text:span text:style-name="T130">→ </text:span><text:span text:style-name="T170">CPU </text:span><text:span text:style-name="T130">暴增</text:span></text:p>
          </table:table-cell>
        </table:table-row>
        <table:table-row table:style-name="表格54.1">
          <table:table-cell table:style-name="表格54.A2" office:value-type="string">
            <text:p text:style-name="P25" loext:marker-style-name="T132"><text:span text:style-name="T171">3 </text:span><text:span text:style-name="T131">大量碎片</text:span></text:p>
          </table:table-cell>
          <table:table-cell table:style-name="表格54.A2" office:value-type="string">
            <text:p text:style-name="P25" loext:marker-style-name="T129"><text:span text:style-name="T130">送出數萬個 </text:span><text:span text:style-name="T170">Fragment</text:span><text:span text:style-name="T130">（同一 </text:span><text:span text:style-name="T170">ID</text:span><text:span text:style-name="T130">）</text:span></text:p>
          </table:table-cell>
          <table:table-cell table:style-name="表格54.A2" office:value-type="string">
            <text:p text:style-name="P25" loext:marker-style-name="T129"><text:span text:style-name="T130">開大量 </text:span><text:span text:style-name="T170">buffer</text:span><text:span text:style-name="T130">、持續重組 → </text:span><text:span text:style-name="T170">RAM </text:span><text:span text:style-name="T130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8"><text:span text:style-name="T176">🛡️ <text:s/></text:span><text:span text:style-name="T217">防禦方式</text:span></text:p>
            <text:p text:style-name="P9" loext:marker-style-name="T101"><text:span text:style-name="T99">防禦：</text:span><text:span text:style-name="T122">設定重組 </text:span><text:span text:style-name="T165">buffer </text:span><text:span text:style-name="T122">上限</text:span><text:span text:style-name="T99">避免無限占用記憶體；</text:span><text:span text:style-name="T121">丟棄等待過久或異常的 </text:span><text:span text:style-name="T164">Fragment</text:span><text:span text:style-name="T99">；</text:span><text:span text:style-name="T120">部署 </text:span><text:span text:style-name="T163">IDS / Firewall </text:span><text:span text:style-name="T120">偵測異常分段</text:span><text:span text:style-name="T99">模式。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6" loext:marker-style-name="T65"><text:span text:style-name="T64">技術概念</text:span><text:span text:style-name="T65"/></text:p>
            </table:table-cell>
            <table:table-cell table:style-name="表格55.A1" office:value-type="string">
              <text:p text:style-name="P6" loext:marker-style-name="T65"><text:span text:style-name="T64">白話比喻</text:span><text:span text:style-name="T6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 loext:marker-style-name="T78"><text:span text:style-name="T138">MTU</text:span><text:span text:style-name="T78"/></text:p>
          </table:table-cell>
          <table:table-cell table:style-name="表格55.A2" office:value-type="string">
            <text:p text:style-name="P25" loext:marker-style-name="T78"><text:span text:style-name="T77">一個貨運箱子最多裝 </text:span><text:span text:style-name="T138">1500g</text:span></text:p>
          </table:table-cell>
        </table:table-row>
        <table:table-row table:style-name="表格55.1">
          <table:table-cell table:style-name="表格55.A3" office:value-type="string">
            <text:p text:style-name="P25" loext:marker-style-name="T78"><text:span text:style-name="T138">Fragmentation</text:span><text:span text:style-name="T78"/></text:p>
          </table:table-cell>
          <table:table-cell table:style-name="表格55.A3" office:value-type="string">
            <text:p text:style-name="P25" loext:marker-style-name="T78"><text:span text:style-name="T77">東西太重 → 分成好幾箱</text:span><text:span text:style-name="T78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87"><text:span text:style-name="T144">Identification</text:span><text:span text:style-name="T87"/></text:p>
          </table:table-cell>
          <table:table-cell table:style-name="表格55.A2" office:value-type="string">
            <text:p text:style-name="P25" loext:marker-style-name="T91"><text:span text:style-name="T90">每箱貼上同一個「訂單號碼」</text:span><text:span text:style-name="T91"/></text:p>
          </table:table-cell>
        </table:table-row>
        <table:table-row table:style-name="表格55.1">
          <table:table-cell table:style-name="表格55.A3" office:value-type="string">
            <text:p text:style-name="P25" loext:marker-style-name="T87"><text:span text:style-name="T144">Fragment Offset</text:span><text:span text:style-name="T87"/></text:p>
          </table:table-cell>
          <table:table-cell table:style-name="表格55.A3" office:value-type="string">
            <text:p text:style-name="P25" loext:marker-style-name="T78"><text:span text:style-name="T77">每箱寫上「我是第幾克開始的貨」</text:span><text:span text:style-name="T78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78"><text:span text:style-name="T138">IPv4 / IPv6</text:span><text:span text:style-name="T78"/></text:p>
          </table:table-cell>
          <table:table-cell table:style-name="表格55.A2" office:value-type="string">
            <text:p text:style-name="P25" loext:marker-style-name="T78"><text:span text:style-name="T138">IPv4</text:span><text:span text:style-name="T77">：郵局可幫你分箱（但最好自己分）／ </text:span><text:span text:style-name="T138">IPv6</text:span><text:span text:style-name="T77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5" loext:marker-style-name="T78"><text:span text:style-name="T138">DF = 1</text:span><text:span text:style-name="T78"/></text:p>
          </table:table-cell>
          <table:table-cell table:style-name="表格55.A3" office:value-type="string">
            <text:p text:style-name="P25" loext:marker-style-name="T78"><text:span text:style-name="T77">貼上「禁止拆箱」標籤 → 太重就退件</text:span><text:span text:style-name="T78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361"><text:span text:style-name="T354">PMTUD</text:span><text:span text:style-name="T361"/></text:p>
          </table:table-cell>
          <table:table-cell table:style-name="表格55.A2" office:value-type="string">
            <text:p text:style-name="P25" loext:marker-style-name="T95"><text:span text:style-name="T94">先試寄 → 被退 → 知道上限 → 調整大小再寄</text:span><text:span text:style-name="T95"/></text:p>
          </table:table-cell>
        </table:table-row>
        <table:table-row table:style-name="表格55.1">
          <table:table-cell table:style-name="表格55.A3" office:value-type="string">
            <text:p text:style-name="P25" loext:marker-style-name="T255"><text:span text:style-name="T245">TTL</text:span><text:span text:style-name="T255"/></text:p>
          </table:table-cell>
          <table:table-cell table:style-name="表格55.A3" office:value-type="string">
            <text:p text:style-name="P25" loext:marker-style-name="T89"><text:span text:style-name="T88">貨物限轉 </text:span><text:span text:style-name="T145">64 </text:span><text:span text:style-name="T88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5" loext:marker-style-name="T87"><text:span text:style-name="T144">MSS</text:span><text:span text:style-name="T87"/></text:p>
          </table:table-cell>
          <table:table-cell table:style-name="表格55.A2" office:value-type="string">
            <text:p text:style-name="P25" loext:marker-style-name="T91"><text:span text:style-name="T90">你自己量好每箱重量，確保不超重</text:span><text:span text:style-name="T91"/></text:p>
          </table:table-cell>
        </table:table-row>
      </table:table>
      <text:h text:style-name="P13" text:outline-level="1" loext:marker-style-name="T67"><text:span text:style-name="T66">第 三 篇　</text:span><text:span text:style-name="T67">IPv4 → IPv6 </text:span><text:span text:style-name="T66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8"><text:span text:style-name="T176">💡 <text:s/></text:span><text:span text:style-name="T47">為什麼要從 </text:span><text:span text:style-name="T58">IPv4 </text:span><text:span text:style-name="T47">換到 </text:span><text:span text:style-name="T58">IPv6</text:span><text:span text:style-name="T47">？</text:span></text:p>
            <text:p text:style-name="P9" loext:marker-style-name="T101"><text:span text:style-name="T148">IPv4 </text:span><text:span text:style-name="T99">在設計之初無法預料網路規模的爆炸性成長。隨著智慧型手機、</text:span><text:span text:style-name="T148">IoT </text:span><text:span text:style-name="T99">裝置大量普及，</text:span><text:span text:style-name="T148">IPv4 </text:span><text:span text:style-name="T99">位址已幾近耗盡，並衍生多項架構缺陷，因此 </text:span><text:span text:style-name="T148">IPv6 </text:span><text:span text:style-name="T99">誕生以從根本解決這些問題。但 </text:span><text:span text:style-name="T148">IPv4 </text:span><text:span text:style-name="T99">不會一夕消失，兩種協定長期並存，因此需要過渡技術。</text:span></text:p>
          </table:table-cell>
        </table:table-row>
      </table:table>
      <text:h text:style-name="P2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6" loext:marker-style-name="T65"><text:span text:style-name="T64">比較項目</text:span><text:span text:style-name="T65"/></text:p>
            </table:table-cell>
            <table:table-cell table:style-name="表格57.A1" office:value-type="string">
              <text:p text:style-name="P6" loext:marker-style-name="T65"><text:span text:style-name="T74">✗ IPv4 </text:span><text:span text:style-name="T64">問題</text:span></text:p>
            </table:table-cell>
            <table:table-cell table:style-name="表格57.A1" office:value-type="string">
              <text:p text:style-name="P6" loext:marker-style-name="T65"><text:span text:style-name="T74">✓ IPv6 </text:span><text:span text:style-name="T64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5" loext:marker-style-name="T78"><text:span text:style-name="T77">位址長度</text:span><text:span text:style-name="T78"/></text:p>
          </table:table-cell>
          <table:table-cell table:style-name="表格57.A2" office:value-type="string">
            <text:p text:style-name="P25" loext:marker-style-name="T78"><text:span text:style-name="T241">32 bit</text:span><text:span text:style-name="T77">，約 </text:span><text:span text:style-name="T138">43 </text:span><text:span text:style-name="T77">億個 </text:span><text:span text:style-name="T138">IP</text:span><text:span text:style-name="T77">，已嚴重不足</text:span></text:p>
          </table:table-cell>
          <table:table-cell table:style-name="表格57.A2" office:value-type="string">
            <text:p text:style-name="P25" loext:marker-style-name="T78"><text:span text:style-name="T355">128 bit</text:span><text:span text:style-name="T77">，約 </text:span><text:span text:style-name="T138">3.4×10³⁸ </text:span><text:span text:style-name="T77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5" loext:marker-style-name="T78"><text:span text:style-name="T138">NAT </text:span><text:span text:style-name="T77">位址轉換</text:span></text:p>
          </table:table-cell>
          <table:table-cell table:style-name="表格57.A3" office:value-type="string">
            <text:p text:style-name="P25" loext:marker-style-name="T78"><text:span text:style-name="T90">需 </text:span><text:span text:style-name="T142">NAT </text:span><text:span text:style-name="T90">共用 </text:span><text:span text:style-name="T142">IP</text:span><text:span text:style-name="T77">，破壞 </text:span><text:span text:style-name="T138">End-to-End</text:span></text:p>
          </table:table-cell>
          <table:table-cell table:style-name="表格57.A3" office:value-type="string">
            <text:p text:style-name="P25" loext:marker-style-name="T78"><text:span text:style-name="T86">每裝置獨立公開 </text:span><text:span text:style-name="T144">IP</text:span><text:span text:style-name="T86">，不需 </text:span><text:span text:style-name="T144">NAT</text:span><text:span text:style-name="T77">，恢復 </text:span><text:span text:style-name="T138">E2E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78"><text:span text:style-name="T77">安全性</text:span><text:span text:style-name="T78"/></text:p>
          </table:table-cell>
          <table:table-cell table:style-name="表格57.A2" office:value-type="string">
            <text:p text:style-name="P25" loext:marker-style-name="T78"><text:span text:style-name="T77">無內建加密／驗證，</text:span><text:span text:style-name="T90">須另裝 </text:span><text:span text:style-name="T142">VPN</text:span></text:p>
          </table:table-cell>
          <table:table-cell table:style-name="表格57.A2" office:value-type="string">
            <text:p text:style-name="P25" loext:marker-style-name="T78"><text:span text:style-name="T256">支援 </text:span><text:span text:style-name="T246">IPsec</text:span><text:span text:style-name="T86">（加密＋驗證）</text:span><text:span text:style-name="T77">※ </text:span><text:span text:style-name="T138">RFC 6434 </text:span><text:span text:style-name="T77">後改建議</text:span></text:p>
          </table:table-cell>
        </table:table-row>
        <table:table-row table:style-name="表格57.1">
          <table:table-cell table:style-name="表格57.A3" office:value-type="string">
            <text:p text:style-name="P25" loext:marker-style-name="T78"><text:span text:style-name="T138">Header </text:span><text:span text:style-name="T77">結構</text:span></text:p>
          </table:table-cell>
          <table:table-cell table:style-name="表格57.A3" office:value-type="string">
            <text:p text:style-name="P25" loext:marker-style-name="T78"><text:span text:style-name="T90">可變長度</text:span><text:span text:style-name="T77">含 </text:span><text:span text:style-name="T138">Options</text:span><text:span text:style-name="T77">，</text:span><text:span text:style-name="T138">Router </text:span><text:span text:style-name="T77">效率低</text:span></text:p>
          </table:table-cell>
          <table:table-cell table:style-name="表格57.A3" office:value-type="string">
            <text:p text:style-name="P25" loext:marker-style-name="T78"><text:span text:style-name="T86">固定 </text:span><text:span text:style-name="T144">40 bytes </text:span><text:span text:style-name="T77">基本 </text:span><text:span text:style-name="T138">Header</text:span><text:span text:style-name="T77">，轉送更快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78"><text:span text:style-name="T77">服務品質 </text:span><text:span text:style-name="T138">QoS</text:span></text:p>
          </table:table-cell>
          <table:table-cell table:style-name="表格57.A2" office:value-type="string">
            <text:p text:style-name="P25" loext:marker-style-name="T91"><text:span text:style-name="T90">無法有效標記流量優先權</text:span><text:span text:style-name="T91"/></text:p>
          </table:table-cell>
          <table:table-cell table:style-name="表格57.A2" office:value-type="string">
            <text:p text:style-name="P25" loext:marker-style-name="T78"><text:span text:style-name="T144">Flow Label </text:span><text:span text:style-name="T86">欄位</text:span><text:span text:style-name="T77">，</text:span><text:span text:style-name="T330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5" loext:marker-style-name="T78"><text:span text:style-name="T77">廣播方式</text:span><text:span text:style-name="T78"/></text:p>
          </table:table-cell>
          <table:table-cell table:style-name="表格57.A3" office:value-type="string">
            <text:p text:style-name="P25" loext:marker-style-name="T78"><text:span text:style-name="T142">Broadcast</text:span><text:span text:style-name="T77">：一次發給所有人，浪費頻寬</text:span></text:p>
          </table:table-cell>
          <table:table-cell table:style-name="表格57.A3" office:value-type="string">
            <text:p text:style-name="P25" loext:marker-style-name="T78"><text:span text:style-name="T77">改用</text:span><text:span text:style-name="T86"> </text:span><text:span text:style-name="T144">Multicast</text:span><text:span text:style-name="T86">（群播）／ </text:span><text:span text:style-name="T144">Anycast</text:span><text:span text:style-name="T86">（任播）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78"><text:span text:style-name="T138">IP </text:span><text:span text:style-name="T77">配置方式</text:span></text:p>
          </table:table-cell>
          <table:table-cell table:style-name="表格57.A2" office:value-type="string">
            <text:p text:style-name="P25" loext:marker-style-name="T78"><text:span text:style-name="T88">需手動設定或 </text:span><text:span text:style-name="T145">DHCP</text:span><text:span text:style-name="T77">，管理繁瑣</text:span></text:p>
          </table:table-cell>
          <table:table-cell table:style-name="表格57.A2" office:value-type="string">
            <text:p text:style-name="P25" loext:marker-style-name="T78"><text:span text:style-name="T138">SLAAC </text:span><text:span text:style-name="T77">無狀態自動配置，</text:span><text:span text:style-name="T304">插網路即取得 </text:span><text:span text:style-name="T299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8"><text:span text:style-name="T176">📌 <text:s/></text:span><text:span text:style-name="T198">補充：</text:span><text:span text:style-name="T202">IPsec </text:span><text:span text:style-name="T198">強制 </text:span><text:span text:style-name="T202">vs </text:span><text:span text:style-name="T198">建議</text:span></text:p>
            <text:p text:style-name="P9" loext:marker-style-name="T101"><text:span text:style-name="T148">IPv6 </text:span><text:span text:style-name="T99">早期規範（</text:span><text:span text:style-name="T148">RFC 2460</text:span><text:span text:style-name="T99">）將 </text:span><text:span text:style-name="T148">IPsec </text:span><text:span text:style-name="T99">列為「強制」；</text:span><text:span text:style-name="T148">2011 </text:span><text:span text:style-name="T99">年 </text:span><text:span text:style-name="T148">RFC 6434 </text:span><text:span text:style-name="T99">修訂後改為「建議（</text:span><text:span text:style-name="T148">SHOULD</text:span><text:span text:style-name="T99">）」。考試普遍仍以「原生支援 </text:span><text:span text:style-name="T148">IPsec</text:span><text:span text:style-name="T99">」作為 </text:span><text:span text:style-name="T148">IPv6 </text:span><text:span text:style-name="T99">改進特色，此處標注供參考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9" loext:marker-style-name="T185"><text:span text:style-name="T191">① </text:span><text:span text:style-name="T193">Dual Stack</text:span><text:span text:style-name="T184">（雙協定堆疊）</text:span><text:span text:style-name="T183">— 最常用、最推薦</text:span></text:p>
            <text:p text:style-name="P10" loext:marker-style-name="T101"><text:span text:style-name="T412">裝置同時具備 </text:span><text:span text:style-name="T418">IPv4 </text:span><text:span text:style-name="T412">與 </text:span><text:span text:style-name="T418">IPv6 </text:span><text:span text:style-name="T412">兩套協定堆疊</text:span><text:span text:style-name="T99">。</text:span><text:span text:style-name="T158">DNS A record → </text:span><text:span text:style-name="T115">回傳 </text:span><text:span text:style-name="T158">IPv4</text:span><text:span text:style-name="T115">；</text:span><text:span text:style-name="T158">DNS AAAA record → </text:span><text:span text:style-name="T115">回傳 </text:span><text:span text:style-name="T158">IPv6</text:span><text:span text:style-name="T99">。連線時優先選用 </text:span><text:span text:style-name="T148">IPv6</text:span><text:span text:style-name="T99">，對端不支援則自動退回 </text:span><text:span text:style-name="T148">IPv4</text:span><text:span text:style-name="T99">。不需任何封包轉換，效能損耗最低。</text:span></text:p>
            <text:p text:style-name="P10" loext:marker-style-name="T101"><text:span text:style-name="T99">流程：輸入 </text:span><text:span text:style-name="T148">google.com → DNS </text:span><text:span text:style-name="T99">回傳 </text:span><text:span text:style-name="T148">A</text:span><text:span text:style-name="T99">＋</text:span><text:span text:style-name="T148">AAAA → </text:span><text:span text:style-name="T99">優先選 </text:span><text:span text:style-name="T148">IPv6 → </text:span><text:span text:style-name="T99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9" loext:marker-style-name="T197"><text:span text:style-name="T199">②</text:span><text:span text:style-name="T201"> Tunneling</text:span><text:span text:style-name="T196">（隧道技術）</text:span><text:span text:style-name="T194">— 過渡期橋接方案</text:span></text:p>
            <text:p text:style-name="P10" loext:marker-style-name="T101"><text:span text:style-name="T99">中間網路只支援 </text:span><text:span text:style-name="T148">IPv4</text:span><text:span text:style-name="T99">，無法直接傳送 </text:span><text:span text:style-name="T148">IPv6 </text:span><text:span text:style-name="T99">封包。解法：</text:span><text:span text:style-name="T412">將 </text:span><text:span text:style-name="T418">IPv6 </text:span><text:span text:style-name="T412">封包完整封裝進 </text:span><text:span text:style-name="T418">IPv4 </text:span><text:span text:style-name="T412">外殼，抵達目的地後拆除外層 </text:span><text:span text:style-name="T418">IPv4</text:span><text:span text:style-name="T412">、還原 </text:span><text:span text:style-name="T418">IPv6 </text:span><text:span text:style-name="T412">封包</text:span><text:span text:style-name="T99">。常見技術：</text:span><text:span text:style-name="T148">6in4</text:span><text:span text:style-name="T99">、</text:span><text:span text:style-name="T148">6to4</text:span><text:span text:style-name="T99">、</text:span><text:span text:style-name="T148">Teredo</text:span><text:span text:style-name="T99">、</text:span><text:span text:style-name="T148">ISATAP</text:span><text:span text:style-name="T99">。</text:span></text:p>
            <text:p text:style-name="P10" loext:marker-style-name="T101"><text:span text:style-name="T99">示意：</text:span><text:span text:style-name="T148">[ IPv4 </text:span><text:span text:style-name="T99">外層 </text:span><text:span text:style-name="T148">Header ][ IPv6 </text:span><text:span text:style-name="T99">封包（完整保留）</text:span><text:span text:style-name="T148">] → </text:span><text:span text:style-name="T99">目的地拆除外殼 → 還原 </text:span><text:span text:style-name="T148">IPv6</text:span><text:span text:style-name="T99">。</text:span></text:p>
          </table:table-cell>
        </table:table-row>
        <table:table-row table:style-name="表格58.1">
          <table:table-cell table:style-name="表格58.A3" office:value-type="string">
            <text:p text:style-name="P9" loext:marker-style-name="T230"><text:span text:style-name="T233">③ </text:span><text:span text:style-name="T234">Translation</text:span><text:span text:style-name="T228">（</text:span><text:span text:style-name="T234">NAT64</text:span><text:span text:style-name="T228">）</text:span><text:span text:style-name="T227">— 協定轉換、互通最後手段</text:span></text:p>
            <text:p text:style-name="P10" loext:marker-style-name="T101"><text:span text:style-name="T99">適用場景：</text:span><text:span text:style-name="T148">IPv6-only </text:span><text:span text:style-name="T99">裝置需與 </text:span><text:span text:style-name="T148">IPv4-only </text:span><text:span text:style-name="T99">裝置直接通訊。</text:span><text:span text:style-name="T271">透過轉換閘道器即時將封包表頭轉換為對方格式</text:span><text:span text:style-name="T99">。代表技術：</text:span><text:span text:style-name="T148">NAT64 + DNS64</text:span><text:span text:style-name="T99">。</text:span><text:span text:style-name="T265">複雜度最高，有額外效能損耗</text:span><text:span text:style-name="T99">。</text:span></text:p>
            <text:p text:style-name="P10" loext:marker-style-name="T101"><text:span text:style-name="T99">示意：</text:span><text:span text:style-name="T148">IPv6 </text:span><text:span text:style-name="T99">裝置 → </text:span><text:span text:style-name="T148">[ NAT64 </text:span><text:span text:style-name="T448">轉換閘道</text:span><text:span text:style-name="T99"> </text:span><text:span text:style-name="T148">] → IPv4 </text:span><text:span text:style-name="T99">裝置（雙向互轉）。</text:span></text:p>
          </table:table-cell>
        </table:table-row>
      </table:table>
      <text:h text:style-name="P2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6" loext:marker-style-name="T69"><text:span text:style-name="T68">技術</text:span><text:span text:style-name="T69"/></text:p>
            </table:table-cell>
            <table:table-cell table:style-name="表格59.A1" office:value-type="string">
              <text:p text:style-name="P6" loext:marker-style-name="T69"><text:span text:style-name="T68">生活比喻</text:span><text:span text:style-name="T69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5" loext:marker-style-name="T125"><text:span text:style-name="T167">Dual Stack</text:span><text:span text:style-name="T125"/></text:p>
          </table:table-cell>
          <table:table-cell table:style-name="表格59.A2" office:value-type="string">
            <text:p text:style-name="P25" loext:marker-style-name="T125"><text:span text:style-name="T124">你</text:span><text:span text:style-name="T128">同時會中文 </text:span><text:span text:style-name="T168">+ </text:span><text:span text:style-name="T128">英文</text:span><text:span text:style-name="T124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5" loext:marker-style-name="T125"><text:span text:style-name="T167">Tunneling</text:span><text:span text:style-name="T125"/></text:p>
          </table:table-cell>
          <table:table-cell table:style-name="表格59.A3" office:value-type="string">
            <text:p text:style-name="P25" loext:marker-style-name="T125"><text:span text:style-name="T321">把英文信裝進中文信封偷渡過去</text:span><text:span text:style-name="T124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5" loext:marker-style-name="T125"><text:span text:style-name="T167">Translation</text:span><text:span text:style-name="T125"/></text:p>
          </table:table-cell>
          <table:table-cell table:style-name="表格59.A2" office:value-type="string">
            <text:p text:style-name="P25" loext:marker-style-name="T125"><text:span text:style-name="T502">現場請翻譯員</text:span><text:span text:style-name="T124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8"><text:span text:style-name="T176">🏠 <text:s/></text:span><text:span text:style-name="T47">用「寄信</text:span><text:span text:style-name="T58">/</text:span><text:span text:style-name="T47">門牌」理解</text:span></text:p>
            <text:p text:style-name="P9"><text:span text:style-name="T341">IPv4 </text:span><text:span text:style-name="T334">的困境：整棟公寓共用一個門牌</text:span><text:span text:style-name="T450">（</text:span><text:span text:style-name="T466">NAT</text:span><text:span text:style-name="T450">）</text:span><text:span text:style-name="T99">，郵差只送到大門，裡面誰是誰要另外猜；地址快用光還在借號碼。</text:span></text:p>
            <text:p text:style-name="P10"><text:span text:style-name="T283">IPv6 </text:span><text:span text:style-name="T266">的世界：每個人都有獨立門牌（公開 </text:span><text:span text:style-name="T283">IP</text:span><text:span text:style-name="T266">）</text:span><text:span text:style-name="T99">，地址多到用不完，郵件直接送到本人手上，不需中間人轉達。</text:span></text:p>
          </table:table-cell>
          <table:covered-table-cell/>
        </table:table-row>
      </table:table>
      <text:h text:style-name="P2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8"><text:span text:style-name="T176">🧠 <text:s/></text:span><text:span text:style-name="T226">一句話記憶法</text:span></text:p>
            <text:p text:style-name="P9"><text:span text:style-name="T233">IPv6 </text:span><text:span text:style-name="T227">特點：</text:span><text:span text:style-name="T99">大（</text:span><text:span text:style-name="T148">128 bit</text:span><text:span text:style-name="T99">）＋ </text:span><text:span text:style-name="T382">安全（</text:span><text:span text:style-name="T394">IPsec</text:span><text:span text:style-name="T382">）</text:span><text:span text:style-name="T99">＋ </text:span><text:span text:style-name="T446">快（固定 </text:span><text:span text:style-name="T463">Header</text:span><text:span text:style-name="T446">）</text:span><text:span text:style-name="T99">＋ 自動（</text:span><text:span text:style-name="T148">SLAAC</text:span><text:span text:style-name="T99">）＋ 乾淨（無 </text:span><text:span text:style-name="T148">Broadcast</text:span><text:span text:style-name="T99">）。</text:span></text:p>
            <text:p text:style-name="P10"><text:span text:style-name="T228">過渡技術</text:span><text:span text:style-name="T227">：</text:span><text:span text:style-name="T99">雙語（</text:span><text:span text:style-name="T158">Dual Stack</text:span><text:span text:style-name="T99">）＋ 偽裝（</text:span><text:span text:style-name="T158">Tunneling</text:span><text:span text:style-name="T99">）＋ 翻譯（</text:span><text:span text:style-name="T158">Translation</text:span><text:span text:style-name="T9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2" loext:marker-style-name="T65"><text:span text:style-name="T74">IPv4 </text:span><text:span text:style-name="T64">七大問題</text:span></text:p>
          </table:table-cell>
          <table:table-cell table:style-name="表格60.A2" office:value-type="string">
            <text:p text:style-name="P22" loext:marker-style-name="T65"><text:span text:style-name="T74">IPv6 </text:span><text:span text:style-name="T64">七大改進</text:span></text:p>
          </table:table-cell>
        </table:table-row>
        <table:table-row table:style-name="表格60.1">
          <table:table-cell table:style-name="表格60.A3" office:value-type="string">
            <text:p text:style-name="P25" loext:marker-style-name="T78"><text:span text:style-name="T77">位址不足（</text:span><text:span text:style-name="T138">32 bit</text:span><text:span text:style-name="T77">）／需 </text:span><text:span text:style-name="T138">NAT </text:span><text:span text:style-name="T77">破壞 </text:span><text:span text:style-name="T138">E2E</text:span><text:span text:style-name="T77">／無加密驗證／</text:span><text:span text:style-name="T458">Header </text:span><text:span text:style-name="T440">可變效率低</text:span><text:span text:style-name="T77">／缺 </text:span><text:span text:style-name="T138">QoS</text:span><text:span text:style-name="T77">／用 </text:span><text:span text:style-name="T138">Broadcast </text:span><text:span text:style-name="T77">浪費／</text:span><text:span text:style-name="T138">IP </text:span><text:span text:style-name="T77">需手動設定</text:span></text:p>
          </table:table-cell>
          <table:table-cell table:style-name="表格60.A3" office:value-type="string">
            <text:p text:style-name="P25" loext:marker-style-name="T78"><text:span text:style-name="T138">128 bit </text:span><text:span text:style-name="T77">近乎無限／不需 </text:span><text:span text:style-name="T138">NAT </text:span><text:span text:style-name="T77">恢復 </text:span><text:span text:style-name="T138">E2E</text:span><text:span text:style-name="T77">／</text:span><text:span text:style-name="T256">支援 </text:span><text:span text:style-name="T246">IPsec</text:span><text:span text:style-name="T77">／</text:span><text:span text:style-name="T256">固定 </text:span><text:span text:style-name="T246">40 bytes </text:span><text:span text:style-name="T256">轉送快</text:span><text:span text:style-name="T77">／</text:span><text:span text:style-name="T138">Flow Label </text:span><text:span text:style-name="T77">支援 </text:span><text:span text:style-name="T138">QoS</text:span><text:span text:style-name="T77">／改用 </text:span><text:span text:style-name="T138">Multicast/Anycast</text:span><text:span text:style-name="T77">／</text:span><text:span text:style-name="T138">SLAAC </text:span><text:span text:style-name="T77">自動配置</text:span></text:p>
          </table:table-cell>
        </table:table-row>
      </table:table>
      <text:h text:style-name="P13" text:outline-level="1" loext:marker-style-name="T67"><text:span text:style-name="T66">第 四 篇　</text:span><text:span text:style-name="T67">ARP</text:span><text:span text:style-name="T66">、</text:span><text:span text:style-name="T67">NAT </text:span><text:span text:style-name="T66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8"><text:span text:style-name="T176">🔑 <text:s/></text:span><text:span text:style-name="T47">最基礎的比喻，先懂這個</text:span></text:p>
            <text:p text:style-name="P9" loext:marker-style-name="T101"><text:span text:style-name="T148">IP </text:span><text:span text:style-name="T99">位址決定「最終送到哪台電腦」；</text:span><text:span text:style-name="T148">MAC </text:span><text:span text:style-name="T99">位址決定「目前這一跳要交給哪個網路設備」。</text:span></text:p>
            <text:p text:style-name="P10" loext:marker-style-name="T101"><text:span text:style-name="T492">資料在網路中「實際傳送」靠 </text:span><text:span text:style-name="T510">MAC</text:span><text:span text:style-name="T99">，</text:span><text:span text:style-name="T381">但我們只知道對方的 </text:span><text:span text:style-name="T393">IP</text:span><text:span text:style-name="T148">——</text:span><text:span text:style-name="T99">所以</text:span><text:span text:style-name="T334">需要一個轉換機制</text:span><text:span text:style-name="T99">，這就是 </text:span><text:span text:style-name="T148">ARP </text:span><text:span text:style-name="T99">的工作。</text:span></text:p>
          </table:table-cell>
        </table:table-row>
      </table:table>
      <text:h text:style-name="P2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32" loext:marker-style-name="T101"><text:span text:style-name="T99">一句話定義：</text:span><text:span text:style-name="T160">ARP</text:span><text:span text:style-name="T148"> </text:span><text:span text:style-name="T99">＝ </text:span><text:span text:style-name="T313">用 </text:span><text:span text:style-name="T324">IP </text:span><text:span text:style-name="T313">找 </text:span><text:span text:style-name="T324">MAC</text:span><text:span text:style-name="T99">，</text:span><text:span text:style-name="T266">只在同一個區域網路（</text:span><text:span text:style-name="T283">LAN</text:span><text:span text:style-name="T266">）內使用</text:span><text:span text:style-name="T99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8"><text:span text:style-name="T176">📋 <text:s/></text:span><text:span text:style-name="T58">ARP </text:span><text:span text:style-name="T47">運作流程（考試必考）</text:span></text:p>
            <text:p text:style-name="P9"><text:span text:style-name="T60">① </text:span><text:span text:style-name="T50">查 </text:span><text:span text:style-name="T59">ARP Cache</text:span><text:span text:style-name="T50">（筆記本）</text:span><text:span text:style-name="T51">：</text:span><text:span text:style-name="T99">先查自己的記錄「</text:span><text:span text:style-name="T522">我之前有沒有問過這個 </text:span><text:span text:style-name="T535">IP</text:span><text:span text:style-name="T522">？</text:span><text:span text:style-name="T99">」有 → 直接用。</text:span></text:p>
            <text:p text:style-name="P10"><text:span text:style-name="T60">② </text:span><text:span text:style-name="T50">發出 </text:span><text:span text:style-name="T59">ARP Request</text:span><text:span text:style-name="T50">（廣播）</text:span><text:span text:style-name="T51">：</text:span><text:span text:style-name="T99">沒記錄 →</text:span><text:span text:style-name="T491"> 對整個區網廣播</text:span><text:span text:style-name="T99">「誰是 </text:span><text:span text:style-name="T148">192.168.1.5</text:span><text:span text:style-name="T99">？</text:span><text:span text:style-name="T491">請告訴我你的 </text:span><text:span text:style-name="T509">MAC</text:span><text:span text:style-name="T491">！</text:span><text:span text:style-name="T99">」所有機器都收到。</text:span></text:p>
            <text:p text:style-name="P10"><text:span text:style-name="T60">③ </text:span><text:span text:style-name="T50">收到 </text:span><text:span text:style-name="T59">ARP Reply</text:span><text:span text:style-name="T50">（單播回應）</text:span><text:span text:style-name="T51">：</text:span><text:span text:style-name="T239">IP </text:span><text:span text:style-name="T238">是 </text:span><text:span text:style-name="T239">192.168.1.5 </text:span><text:span text:style-name="T238">的機器回應「我是！</text:span><text:span text:style-name="T239">MAC </text:span><text:span text:style-name="T238">是 </text:span><text:span text:style-name="T239">AA:BB:CC</text:span><text:span text:style-name="T238">」</text:span><text:span text:style-name="T99">，其餘機器靜默忽略。</text:span></text:p>
            <text:p text:style-name="P10"><text:span text:style-name="T60">④ </text:span><text:span text:style-name="T50">存進 </text:span><text:span text:style-name="T59">ARP Cache</text:span><text:span text:style-name="T51">：</text:span><text:span text:style-name="T380">把「</text:span><text:span text:style-name="T392">IP ↔ MAC</text:span><text:span text:style-name="T380">」對應記下</text:span><text:span text:style-name="T99">，</text:span><text:span text:style-name="T266">下次直接用</text:span><text:span text:style-name="T9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6" loext:marker-style-name="T65"><text:span text:style-name="T64">項目</text:span><text:span text:style-name="T65"/></text:p>
          </table:table-cell>
          <table:table-cell table:style-name="表格62.A2" office:value-type="string">
            <text:p text:style-name="P6" loext:marker-style-name="T65"><text:span text:style-name="T64">內容</text:span><text:span text:style-name="T65"/></text:p>
          </table:table-cell>
        </table:table-row>
        <table:table-row table:style-name="表格62.1">
          <table:table-cell table:style-name="表格62.A3" office:value-type="string">
            <text:p text:style-name="P25" loext:marker-style-name="T442"><text:span text:style-name="T459">ARP Spoofing</text:span><text:span text:style-name="T441">（</text:span><text:span text:style-name="T459">ARP </text:span><text:span text:style-name="T441">欺騙）</text:span></text:p>
          </table:table-cell>
          <table:table-cell table:style-name="表格62.A3" office:value-type="string">
            <text:p text:style-name="P25" loext:marker-style-name="T78"><text:span text:style-name="T362">攻擊者</text:span><text:span text:style-name="T497">假冒他人</text:span><text:span text:style-name="T362">的 </text:span><text:span text:style-name="T355">MAC</text:span><text:span text:style-name="T362">，讓封包被送到錯的地方</text:span><text:span text:style-name="T77"> → 中間人攻擊（</text:span><text:span text:style-name="T138">MITM</text:span><text:span text:style-name="T77">）</text:span></text:p>
          </table:table-cell>
        </table:table-row>
        <table:table-row table:style-name="表格62.1">
          <table:table-cell table:style-name="表格62.A4" office:value-type="string">
            <text:p text:style-name="P25" loext:marker-style-name="T91"><text:span text:style-name="T142">arp -a</text:span><text:span text:style-name="T91"/></text:p>
          </table:table-cell>
          <table:table-cell table:style-name="表格62.A4" office:value-type="string">
            <text:p text:style-name="P25" loext:marker-style-name="T78"><text:span text:style-name="T498">查看本機的 </text:span><text:span text:style-name="T515">ARP </text:span><text:span text:style-name="T498">對應表</text:span><text:span text:style-name="T77">（</text:span><text:span text:style-name="T146">IP ↔ MAC </text:span><text:span text:style-name="T96">清單</text:span><text:span text:style-name="T77">）</text:span></text:p>
          </table:table-cell>
        </table:table-row>
        <table:table-row table:style-name="表格62.1">
          <table:table-cell table:style-name="表格62.A3" office:value-type="string">
            <text:p text:style-name="P25" loext:marker-style-name="T257"><text:span text:style-name="T246">ping [IP]</text:span><text:span text:style-name="T257"/></text:p>
          </table:table-cell>
          <table:table-cell table:style-name="表格62.A3" office:value-type="string">
            <text:p text:style-name="P25" loext:marker-style-name="T78"><text:span text:style-name="T304">觸發 </text:span><text:span text:style-name="T299">ARP </text:span><text:span text:style-name="T304">運作</text:span><text:span text:style-name="T77">，</text:span><text:span text:style-name="T251">讓電腦主動查詢對應 </text:span><text:span text:style-name="T241">MAC</text:span></text:p>
          </table:table-cell>
        </table:table-row>
      </table:table>
      <text:h text:style-name="P2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32" loext:marker-style-name="T101"><text:span text:style-name="T99">一句話定義：</text:span><text:span text:style-name="T158">NAT</text:span><text:span text:style-name="T148"> </text:span><text:span text:style-name="T99">＝ </text:span><text:span text:style-name="T522">路由器幫你把「私有 </text:span><text:span text:style-name="T535">IP</text:span><text:span text:style-name="T522">」改成「公網 </text:span><text:span text:style-name="T535">IP</text:span><text:span text:style-name="T522">」</text:span><text:span text:style-name="T99">，讓內部機器能夠上網。</text:span><text:span text:style-name="T238">私有 </text:span><text:span text:style-name="T239">IP</text:span><text:span text:style-name="T238">（如 </text:span><text:span text:style-name="T239">192.168.1.2</text:span><text:span text:style-name="T238">）外網看不到，只在家裡用</text:span><text:span text:style-name="T99">；路由器的公網 </text:span><text:span text:style-name="T148">IP</text:span><text:span text:style-name="T99">（</text:span><text:span text:style-name="T148">220.x.x.x</text:span><text:span text:style-name="T99">，</text:span><text:span text:style-name="T148">ISP </text:span><text:span text:style-name="T99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8"><text:span text:style-name="T176">▸ <text:s/></text:span><text:span text:style-name="T58">NAT </text:span><text:span text:style-name="T47">運作流程</text:span></text:p>
            <text:p text:style-name="P9" loext:marker-style-name="T101"><text:span text:style-name="T148">① </text:span><text:span text:style-name="T99">你的電腦（</text:span><text:span text:style-name="T148">192.168.1.2</text:span><text:span text:style-name="T99">）發送資料給 </text:span><text:span text:style-name="T148">Google → ② </text:span><text:span text:style-name="T334">封包抵達路由器</text:span><text:span text:style-name="T99">，</text:span><text:span text:style-name="T283">NAT </text:span><text:span text:style-name="T266">把來源 </text:span><text:span text:style-name="T283">IP </text:span><text:span text:style-name="T266">改成公網 </text:span><text:span text:style-name="T283">IP</text:span><text:span text:style-name="T266">（</text:span><text:span text:style-name="T283">220.x.x.x</text:span><text:span text:style-name="T266">）</text:span><text:span text:style-name="T446">對外偽裝身份</text:span><text:span text:style-name="T99"> → ③ </text:span><text:span text:style-name="T148">Google </text:span><text:span text:style-name="T99">收到，回應給公網 </text:span><text:span text:style-name="T148">IP</text:span><text:span text:style-name="T99">（</text:span><text:span text:style-name="T148">220.x.x.x</text:span><text:span text:style-name="T99">）→ ④ 路由器把目的地 </text:span><text:span text:style-name="T148">IP </text:span><text:span text:style-name="T99">換回 </text:span><text:span text:style-name="T148">192.168.1.2</text:span><text:span text:style-name="T99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6" loext:marker-style-name="T65"><text:span text:style-name="T64">類型</text:span><text:span text:style-name="T65"/></text:p>
          </table:table-cell>
          <table:table-cell table:style-name="表格63.A2" office:value-type="string">
            <text:p text:style-name="P6" loext:marker-style-name="T65"><text:span text:style-name="T64">中文</text:span><text:span text:style-name="T65"/></text:p>
          </table:table-cell>
          <table:table-cell table:style-name="表格63.A2" office:value-type="string">
            <text:p text:style-name="P6" loext:marker-style-name="T65"><text:span text:style-name="T64">說明</text:span><text:span text:style-name="T65"/></text:p>
          </table:table-cell>
          <table:table-cell table:style-name="表格63.A2" office:value-type="string">
            <text:p text:style-name="P6" loext:marker-style-name="T65"><text:span text:style-name="T64">特點</text:span><text:span text:style-name="T65"/></text:p>
          </table:table-cell>
        </table:table-row>
        <table:table-row table:style-name="表格63.1">
          <table:table-cell table:style-name="表格63.A3" office:value-type="string">
            <text:p text:style-name="P25" loext:marker-style-name="T87"><text:span text:style-name="T144">Static NAT</text:span><text:span text:style-name="T87"/></text:p>
          </table:table-cell>
          <table:table-cell table:style-name="表格63.A3" office:value-type="string">
            <text:p text:style-name="P25" loext:marker-style-name="T78"><text:span text:style-name="T77">靜態 </text:span><text:span text:style-name="T138">NAT</text:span></text:p>
          </table:table-cell>
          <table:table-cell table:style-name="表格63.A3" office:value-type="string">
            <text:p text:style-name="P25" loext:marker-style-name="T404"><text:span text:style-name="T403">一個私有 </text:span><text:span text:style-name="T398">IP ↔ </text:span><text:span text:style-name="T403">一個公網 </text:span><text:span text:style-name="T398">IP</text:span></text:p>
          </table:table-cell>
          <table:table-cell table:style-name="表格63.A3" office:value-type="string">
            <text:p text:style-name="P25" loext:marker-style-name="T404"><text:span text:style-name="T403">固定對應</text:span><text:span text:style-name="T404"/></text:p>
          </table:table-cell>
        </table:table-row>
        <table:table-row table:style-name="表格63.1">
          <table:table-cell table:style-name="表格63.A4" office:value-type="string">
            <text:p text:style-name="P25" loext:marker-style-name="T87"><text:span text:style-name="T144">Dynamic NAT</text:span><text:span text:style-name="T87"/></text:p>
          </table:table-cell>
          <table:table-cell table:style-name="表格63.A4" office:value-type="string">
            <text:p text:style-name="P25" loext:marker-style-name="T78"><text:span text:style-name="T77">動態 </text:span><text:span text:style-name="T138">NAT</text:span></text:p>
          </table:table-cell>
          <table:table-cell table:style-name="表格63.A4" office:value-type="string">
            <text:p text:style-name="P25" loext:marker-style-name="T544"><text:span text:style-name="T543">多個私有 </text:span><text:span text:style-name="T547">IP </text:span><text:span text:style-name="T543">對應 </text:span><text:span text:style-name="T547">IP </text:span><text:span text:style-name="T543">池（</text:span><text:span text:style-name="T547">pool</text:span><text:span text:style-name="T543">）</text:span></text:p>
          </table:table-cell>
          <table:table-cell table:style-name="表格63.A4" office:value-type="string">
            <text:p text:style-name="P25" loext:marker-style-name="T544"><text:span text:style-name="T543">動態分配</text:span><text:span text:style-name="T544"/></text:p>
          </table:table-cell>
        </table:table-row>
        <table:table-row table:style-name="表格63.1">
          <table:table-cell table:style-name="表格63.A3" office:value-type="string">
            <text:p text:style-name="P25" loext:marker-style-name="T442"><text:span text:style-name="T459">PAT</text:span><text:span text:style-name="T442"/></text:p>
          </table:table-cell>
          <table:table-cell table:style-name="表格63.A3" office:value-type="string">
            <text:p text:style-name="P25" loext:marker-style-name="T78"><text:span text:style-name="T77">連接埠位址轉換</text:span><text:span text:style-name="T78"/></text:p>
          </table:table-cell>
          <table:table-cell table:style-name="表格63.A3" office:value-type="string">
            <text:p text:style-name="P25" loext:marker-style-name="T550"><text:span text:style-name="T549">多台共用一個公網 </text:span><text:span text:style-name="T551">IP</text:span></text:p>
          </table:table-cell>
          <table:table-cell table:style-name="表格63.A3" office:value-type="string">
            <text:p text:style-name="P25" loext:marker-style-name="T550"><text:span text:style-name="T549">靠 </text:span><text:span text:style-name="T551">Port </text:span><text:span text:style-name="T549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8"><text:span text:style-name="T176">⚠️ <text:s/></text:span><text:span text:style-name="T202">NAT </text:span><text:span text:style-name="T198">的缺點（考試超愛）</text:span></text:p>
            <text:p text:style-name="P9"><text:span text:style-name="T492">破壞 </text:span><text:span text:style-name="T510">End-to-End </text:span><text:span text:style-name="T492">連線</text:span><text:span text:style-name="T194">（最重要）：</text:span><text:span text:style-name="T99">原本你↔對方是真正點對點；</text:span><text:span text:style-name="T115">有 </text:span><text:span text:style-name="T158">NAT </text:span><text:span text:style-name="T115">後變成你→</text:span><text:span text:style-name="T158">NAT→</text:span><text:span text:style-name="T115">對方，多一層轉換，不再是端對端</text:span><text:span text:style-name="T99">。</text:span></text:p>
            <text:p text:style-name="P10"><text:span text:style-name="T510">P2P / VoIP </text:span><text:span text:style-name="T492">難以運作</text:span><text:span text:style-name="T194">：</text:span><text:span text:style-name="T266">外部機器找不到你（被藏在 </text:span><text:span text:style-name="T283">NAT </text:span><text:span text:style-name="T266">後）</text:span><text:span text:style-name="T99">，</text:span><text:span text:style-name="T148">P2P </text:span><text:span text:style-name="T99">下載、</text:span><text:span text:style-name="T148">VoIP </text:span><text:span text:style-name="T99">通話等</text:span><text:span text:style-name="T545">直連功能受限</text:span><text:span text:style-name="T99">。</text:span></text:p>
            <text:p text:style-name="P10"><text:span text:style-name="T492">增加延遲</text:span><text:span text:style-name="T194">：</text:span><text:span text:style-name="T350">每個封包都需要</text:span><text:span text:style-name="T552">多一道 </text:span><text:span text:style-name="T553">IP </text:span><text:span text:style-name="T552">轉換處理</text:span><text:span text:style-name="T99">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32" loext:marker-style-name="T101"><text:span text:style-name="T115">核心問題</text:span><text:span text:style-name="T99">：</text:span><text:span text:style-name="T334">外面的人只看到一個公網 </text:span><text:span text:style-name="T341">IP</text:span><text:span text:style-name="T99">，但</text:span><text:span text:style-name="T554">內部有多台機器，路由器不知道要轉給哪一台</text:span><text:span text:style-name="T99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9" loext:marker-style-name="T52"><text:span text:style-name="T51">方法一：</text:span><text:span text:style-name="T59">Port Forwarding</text:span><text:span text:style-name="T50">（手動指定轉發）</text:span></text:p>
            <text:p text:style-name="P10" loext:marker-style-name="T101"><text:span text:style-name="T99">比喻：</text:span><text:span text:style-name="T393">Port</text:span><text:span text:style-name="T381">＝房間號碼</text:span><text:span text:style-name="T99">；</text:span><text:span text:style-name="T535">NAT </text:span><text:span text:style-name="T522">路由器＝大樓</text:span><text:span text:style-name="T99">；</text:span><text:span text:style-name="T393">Port Forwarding</text:span><text:span text:style-name="T381">＝門口指示牌「</text:span><text:span text:style-name="T393">80 </text:span><text:span text:style-name="T381">號房 → </text:span><text:span text:style-name="T393">192.168.1.2</text:span><text:span text:style-name="T381">」</text:span><text:span text:style-name="T99">。例：</text:span><text:span text:style-name="T148">220.x.x.x:80 → 192.168.1.2:80</text:span><text:span text:style-name="T99">（</text:span><text:span text:style-name="T526">網頁</text:span><text:span text:style-name="T99">）；</text:span><text:span text:style-name="T148">220.x.x.x:25565 → 192.168.1.2:25565</text:span><text:span text:style-name="T99">（</text:span><text:span text:style-name="T148">Minecraft</text:span><text:span text:style-name="T99">）。</text:span></text:p>
            <text:p text:style-name="P10"><text:span text:style-name="T114">優點：</text:span><text:span text:style-name="T99">設定直接、穩定，可精確控制。</text:span><text:span text:style-name="T114">缺點：</text:span><text:span text:style-name="T448">每個服務都要手動設定，</text:span><text:span text:style-name="T464">IP </text:span><text:span text:style-name="T448">改變要重設</text:span><text:span text:style-name="T9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9" loext:marker-style-name="T185"><text:span text:style-name="T183">方法二：</text:span><text:span text:style-name="T193">UPnP</text:span><text:span text:style-name="T184">（自動版 </text:span><text:span text:style-name="T193">Port Forwarding</text:span><text:span text:style-name="T184">）</text:span></text:p>
            <text:p text:style-name="P10" loext:marker-style-name="T101"><text:span text:style-name="T272">讓裝置自動跟</text:span><text:span text:style-name="T473">路由器</text:span><text:span text:style-name="T272">要求「幫我開一個 </text:span><text:span text:style-name="T289">Port</text:span><text:span text:style-name="T272">」，不需人工設定。</text:span><text:span text:style-name="T99">① </text:span><text:span text:style-name="T524">應用程式發 </text:span><text:span text:style-name="T536">UPnP </text:span><text:span text:style-name="T524">請求</text:span><text:span text:style-name="T99"> → ② </text:span><text:span text:style-name="T474">路由器</text:span><text:span text:style-name="T524">自動新增 </text:span><text:span text:style-name="T536">Port Forwarding </text:span><text:span text:style-name="T524">規則</text:span><text:span text:style-name="T99"> → ③</text:span><text:span text:style-name="T273"> 服務結束後自動清除</text:span><text:span text:style-name="T99">（理想情況）。</text:span></text:p>
            <text:p text:style-name="P10"><text:span text:style-name="T114">優點：</text:span><text:span text:style-name="T99">全自動、對一般用戶友善。</text:span><text:span text:style-name="T208">安全風險（重要）：</text:span><text:span text:style-name="T448">惡意程式也能透過 </text:span><text:span text:style-name="T464">UPnP </text:span><text:span text:style-name="T448">自動開 </text:span><text:span text:style-name="T464">Port</text:span><text:span text:style-name="T448">，可能讓攻擊者直接連入內網</text:span><text:span text:style-name="T99">。建議不需要時關閉 </text:span><text:span text:style-name="T148">UPnP</text:span><text:span text:style-name="T99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9" loext:marker-style-name="T230"><text:span text:style-name="T227">方法三：</text:span><text:span text:style-name="T234">STUN</text:span><text:span text:style-name="T228">（打洞技術）</text:span></text:p>
            <text:p text:style-name="P10" loext:marker-style-name="T101"><text:span text:style-name="T115">使用情境</text:span><text:span text:style-name="T99">：</text:span><text:span text:style-name="T555">兩端都在各自 </text:span><text:span text:style-name="T559">NAT </text:span><text:span text:style-name="T555">後面，彼此都是私有 </text:span><text:span text:style-name="T559">IP</text:span><text:span text:style-name="T555">、互相找不到。</text:span><text:span text:style-name="T559">STUN </text:span><text:span text:style-name="T555">先幫每端「查清楚自己對外的公網 </text:span><text:span text:style-name="T559">IP + Port</text:span><text:span text:style-name="T555">」，再交換資訊</text:span><text:span text:style-name="T99">嘗試直接打通。</text:span></text:p>
            <text:p text:style-name="P10" loext:marker-style-name="T101"><text:span text:style-name="T148">① </text:span><text:span text:style-name="T562">問 </text:span><text:span text:style-name="T564">STUN </text:span><text:span text:style-name="T562">伺服器「我對外的 </text:span><text:span text:style-name="T564">IP </text:span><text:span text:style-name="T562">和 </text:span><text:span text:style-name="T564">Port </text:span><text:span text:style-name="T562">是什麼？」</text:span><text:span text:style-name="T99">② </text:span><text:span text:style-name="T564">STUN </text:span><text:span text:style-name="T562">回「你對外是 </text:span><text:span text:style-name="T564">220.x.x.x:12345</text:span><text:span text:style-name="T562">」</text:span><text:span text:style-name="T99">③ </text:span><text:span text:style-name="T238">朋友也做同樣的事</text:span><text:span text:style-name="T99"> → ④ </text:span><text:span text:style-name="T562">兩端透過第三方交換彼此公網位址</text:span><text:span text:style-name="T99"> → ⑤ </text:span><text:span text:style-name="T562">同時互相發送封包打洞（</text:span><text:span text:style-name="T564">Hole Punching</text:span><text:span text:style-name="T562">）</text:span><text:span text:style-name="T99">。</text:span></text:p>
            <text:p text:style-name="P10"><text:span text:style-name="T208">重要限制：</text:span><text:span text:style-name="T464">STUN </text:span><text:span text:style-name="T448">只對部分 </text:span><text:span text:style-name="T464">NAT </text:span><text:span text:style-name="T448">類型有效</text:span><text:span text:style-name="T99">；若兩端都是 </text:span><text:span text:style-name="T148">Symmetric NAT</text:span><text:span text:style-name="T99">，打洞會失敗，需改用 </text:span><text:span text:style-name="T148">TURN </text:span><text:span text:style-name="T99">伺服器作為中繼轉發。（</text:span><text:span text:style-name="T148">WebRTC </text:span><text:span text:style-name="T99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6" loext:marker-style-name="T65"><text:span text:style-name="T64">方法</text:span><text:span text:style-name="T65"/></text:p>
          </table:table-cell>
          <table:table-cell table:style-name="表格64.A4" office:value-type="string">
            <text:p text:style-name="P6" loext:marker-style-name="T65"><text:span text:style-name="T64">設定方式</text:span><text:span text:style-name="T65"/></text:p>
          </table:table-cell>
          <table:table-cell table:style-name="表格64.A4" office:value-type="string">
            <text:p text:style-name="P6" loext:marker-style-name="T65"><text:span text:style-name="T64">典型場景</text:span><text:span text:style-name="T65"/></text:p>
          </table:table-cell>
          <table:table-cell table:style-name="表格64.A4" office:value-type="string">
            <text:p text:style-name="P6" loext:marker-style-name="T65"><text:span text:style-name="T64">主要限制</text:span><text:span text:style-name="T65"/></text:p>
          </table:table-cell>
        </table:table-row>
        <table:table-row table:style-name="表格64.1">
          <table:table-cell table:style-name="表格64.A5" office:value-type="string">
            <text:p text:style-name="P25" loext:marker-style-name="T78"><text:span text:style-name="T138">Port Forwarding</text:span><text:span text:style-name="T78"/></text:p>
          </table:table-cell>
          <table:table-cell table:style-name="表格64.A5" office:value-type="string">
            <text:p text:style-name="P25" loext:marker-style-name="T87"><text:span text:style-name="T86">手動設定路由器</text:span><text:span text:style-name="T87"/></text:p>
          </table:table-cell>
          <table:table-cell table:style-name="表格64.A5" office:value-type="string">
            <text:p text:style-name="P25" loext:marker-style-name="T78"><text:span text:style-name="T77">架設網頁／遊戲伺服器</text:span><text:span text:style-name="T78"/></text:p>
          </table:table-cell>
          <table:table-cell table:style-name="表格64.A5" office:value-type="string">
            <text:p text:style-name="P25" loext:marker-style-name="T78"><text:span text:style-name="T77">需要手動維護</text:span><text:span text:style-name="T78"/></text:p>
          </table:table-cell>
        </table:table-row>
        <table:table-row table:style-name="表格64.1">
          <table:table-cell table:style-name="表格64.A6" office:value-type="string">
            <text:p text:style-name="P25" loext:marker-style-name="T78"><text:span text:style-name="T138">UPnP</text:span><text:span text:style-name="T78"/></text:p>
          </table:table-cell>
          <table:table-cell table:style-name="表格64.A6" office:value-type="string">
            <text:p text:style-name="P25" loext:marker-style-name="T87"><text:span text:style-name="T86">應用程式自動設定</text:span><text:span text:style-name="T87"/></text:p>
          </table:table-cell>
          <table:table-cell table:style-name="表格64.A6" office:value-type="string">
            <text:p text:style-name="P25" loext:marker-style-name="T78"><text:span text:style-name="T77">一般遊戲、視訊軟體</text:span><text:span text:style-name="T78"/></text:p>
          </table:table-cell>
          <table:table-cell table:style-name="表格64.A6" office:value-type="string">
            <text:p text:style-name="P25" loext:marker-style-name="T78"><text:span text:style-name="T77">惡意程式可濫用</text:span><text:span text:style-name="T78"/></text:p>
          </table:table-cell>
        </table:table-row>
        <table:table-row table:style-name="表格64.1">
          <table:table-cell table:style-name="表格64.A5" office:value-type="string">
            <text:p text:style-name="P25" loext:marker-style-name="T78"><text:span text:style-name="T138">STUN</text:span><text:span text:style-name="T78"/></text:p>
          </table:table-cell>
          <table:table-cell table:style-name="表格64.A5" office:value-type="string">
            <text:p text:style-name="P25" loext:marker-style-name="T87"><text:span text:style-name="T86">無需路由器設定</text:span><text:span text:style-name="T87"/></text:p>
          </table:table-cell>
          <table:table-cell table:style-name="表格64.A5" office:value-type="string">
            <text:p text:style-name="P25" loext:marker-style-name="T78"><text:span text:style-name="T138">WebRTC</text:span><text:span text:style-name="T77">、</text:span><text:span text:style-name="T138">P2P </text:span><text:span text:style-name="T77">通話</text:span></text:p>
          </table:table-cell>
          <table:table-cell table:style-name="表格64.A5" office:value-type="string">
            <text:p text:style-name="P25" loext:marker-style-name="T78"><text:span text:style-name="T138">Symmetric NAT </text:span><text:span text:style-name="T77">會失敗</text:span></text:p>
          </table:table-cell>
        </table:table-row>
      </table:table>
      <text:h text:style-name="P2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8"><text:span text:style-name="T176">🎯 <text:s/></text:span><text:span text:style-name="T226">最重要的核心觀念（先記住）</text:span></text:p>
            <text:p text:style-name="P9"><text:span text:style-name="T233">IP </text:span><text:span text:style-name="T227">位址＝</text:span><text:span text:style-name="T99">決定封包的最終目的地（整條路的終點），像信封上的收件地址。</text:span></text:p>
            <text:p text:style-name="P10"><text:span text:style-name="T233">MAC </text:span><text:span text:style-name="T227">位址＝</text:span><text:span text:style-name="T99">決定「下一站」要交給哪台機器，像快遞員每次只看下一站。</text:span></text:p>
            <text:p text:style-name="P10"><text:span text:style-name="T208">關鍵理解：</text:span><text:span text:style-name="T99">封包在傳送途中，</text:span><text:span text:style-name="T148">IP </text:span><text:span text:style-name="T99">不變（始終是 </text:span><text:span text:style-name="T148">Google </text:span><text:span text:style-name="T99">的 </text:span><text:span text:style-name="T148">IP</text:span><text:span text:style-name="T99">），但 </text:span><text:span text:style-name="T148">MAC </text:span><text:span text:style-name="T99">每一跳都會更換。</text:span></text:p>
          </table:table-cell>
        </table:table-row>
      </table:table>
      <text:p text:style-name="P32" loext:marker-style-name="T11"><text:span text:style-name="T12">場景</text:span><text:span text:style-name="T10">：</text:span><text:span text:style-name="T565">你電腦 </text:span><text:span text:style-name="T568">192.168.1.2</text:span><text:span text:style-name="T565">／路由器內網 </text:span><text:span text:style-name="T568">IP 192.168.1.1</text:span><text:span text:style-name="T565">／路由器公網 </text:span><text:span text:style-name="T568">IP 220.x.x.x</text:span><text:span text:style-name="T565">／目標 </text:span><text:span text:style-name="T568">google.com</text:span><text:span text:style-name="T10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6" loext:marker-style-name="T71"><text:span text:style-name="T70">步驟</text:span><text:span text:style-name="T71"/></text:p>
            </table:table-cell>
            <table:table-cell table:style-name="表格66.A1" office:value-type="string">
              <text:p text:style-name="P6" loext:marker-style-name="T71"><text:span text:style-name="T70">動作</text:span><text:span text:style-name="T71"/></text:p>
            </table:table-cell>
            <table:table-cell table:style-name="表格66.A1" office:value-type="string">
              <text:p text:style-name="P6" loext:marker-style-name="T71"><text:span text:style-name="T70">使用技術</text:span><text:span text:style-name="T71"/></text:p>
            </table:table-cell>
            <table:table-cell table:style-name="表格66.A1" office:value-type="string">
              <text:p text:style-name="P6" loext:marker-style-name="T71"><text:span text:style-name="T70">關鍵重點</text:span><text:span text:style-name="T71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5" loext:marker-style-name="T129"><text:span text:style-name="T170">① DNS</text:span><text:span text:style-name="T129"/></text:p>
          </table:table-cell>
          <table:table-cell table:style-name="表格66.A2" office:value-type="string">
            <text:p text:style-name="P25" loext:marker-style-name="T129"><text:span text:style-name="T170">google.com → 142.250.xxx.xxx(</text:span><text:span text:style-name="T173">Google </text:span><text:span text:style-name="T135">的 </text:span><text:span text:style-name="T173">IP</text:span><text:span text:style-name="T170">)</text:span></text:p>
            <text:p text:style-name="P25" loext:marker-style-name="T129"><text:span text:style-name="T170">(</text:span><text:span text:style-name="T130">電腦必須知道目的地在哪</text:span><text:span text:style-name="T170">)</text:span></text:p>
          </table:table-cell>
          <table:table-cell table:style-name="表格66.A2" office:value-type="string">
            <text:p text:style-name="P25" loext:marker-style-name="T129"><text:span text:style-name="T170">DNS</text:span><text:span text:style-name="T129"/></text:p>
          </table:table-cell>
          <table:table-cell table:style-name="表格66.A2" office:value-type="string">
            <text:p text:style-name="P25" loext:marker-style-name="T129"><text:span text:style-name="T130">網路只認 </text:span><text:span text:style-name="T170">IP</text:span><text:span text:style-name="T130">，不認名字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29"><text:span text:style-name="T170">② ARP</text:span><text:span text:style-name="T129"/></text:p>
          </table:table-cell>
          <table:table-cell table:style-name="表格66.A3" office:value-type="string">
            <text:p text:style-name="P25" loext:marker-style-name="T129"><text:span text:style-name="T130">找路由器（</text:span><text:span text:style-name="T170">192.168.1.1</text:span><text:span text:style-name="T130">）的 </text:span><text:span text:style-name="T170">MAC(</text:span><text:span text:style-name="T369">發現 </text:span><text:span text:style-name="T385">Google </text:span><text:span text:style-name="T503">不在同一個區網</text:span><text:span text:style-name="T369">，必須交給路由器幫忙送</text:span><text:span text:style-name="T170">)(</text:span><text:span text:style-name="T528">查詢路由器的 </text:span><text:span text:style-name="T538">MAC</text:span><text:span text:style-name="T528">，下一站是路由器</text:span><text:span text:style-name="T170">)</text:span></text:p>
          </table:table-cell>
          <table:table-cell table:style-name="表格66.A3" office:value-type="string">
            <text:p text:style-name="P25" loext:marker-style-name="T129"><text:span text:style-name="T170">ARP</text:span><text:span text:style-name="T129"/></text:p>
          </table:table-cell>
          <table:table-cell table:style-name="表格66.A3" office:value-type="string">
            <text:p text:style-name="P25" loext:marker-style-name="T129"><text:span text:style-name="T130">找的是「路由器」，不是 </text:span><text:span text:style-name="T170">Google</text:span><text:span text:style-name="T130">！</text:span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29"><text:span text:style-name="T170">③ </text:span><text:span text:style-name="T434">送封包</text:span></text:p>
          </table:table-cell>
          <table:table-cell table:style-name="表格66.A2" office:value-type="string">
            <text:p text:style-name="P25" loext:marker-style-name="T129"><text:span text:style-name="T170">IP=Google</text:span><text:span text:style-name="T130">；</text:span><text:span text:style-name="T170">MAC=</text:span><text:span text:style-name="T130">路由器</text:span><text:span text:style-name="T170">(</text:span><text:span text:style-name="T297">IP </text:span><text:span text:style-name="T260">記</text:span><text:soft-page-break/><text:span text:style-name="T260">錄最終目的地；</text:span><text:span text:style-name="T297">MAC </text:span><text:span text:style-name="T260">記錄下一站</text:span><text:span text:style-name="T170">)</text:span></text:p>
          </table:table-cell>
          <table:table-cell table:style-name="表格66.A2" office:value-type="string">
            <text:p text:style-name="P25" loext:marker-style-name="T129"><text:span text:style-name="T170">L2 </text:span><text:span text:style-name="T130">傳輸</text:span></text:p>
          </table:table-cell>
          <table:table-cell table:style-name="表格66.A2" office:value-type="string">
            <text:p text:style-name="P25" loext:marker-style-name="T129"><text:span text:style-name="T170">IP=</text:span><text:span text:style-name="T130">終點；</text:span><text:span text:style-name="T170">MAC=</text:span><text:span text:style-name="T130">下一站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29"><text:span text:style-name="T170">④ NAT </text:span><text:span text:style-name="T130">去程</text:span></text:p>
          </table:table-cell>
          <table:table-cell table:style-name="表格66.A3" office:value-type="string">
            <text:p text:style-name="P25" loext:marker-style-name="T129"><text:span text:style-name="T469">192.168.1.2 → 220.x.x.x</text:span><text:span text:style-name="T170">(</text:span><text:span text:style-name="T530">路由器收到後往 </text:span><text:span text:style-name="T539">Internet </text:span><text:span text:style-name="T530">送</text:span><text:span text:style-name="T130">；路由器負責跨網路傳遞</text:span><text:span text:style-name="T170">)(</text:span><text:span text:style-name="T530">私有 </text:span><text:span text:style-name="T539">IP </text:span><text:span text:style-name="T530">換成公網 </text:span><text:span text:style-name="T539">IP</text:span><text:span text:style-name="T530">，因</text:span><text:span text:style-name="T539">Internet </text:span><text:span text:style-name="T530">不認私有 </text:span><text:span text:style-name="T539">IP</text:span><text:span text:style-name="T170">)</text:span></text:p>
          </table:table-cell>
          <table:table-cell table:style-name="表格66.A3" office:value-type="string">
            <text:p text:style-name="P25" loext:marker-style-name="T129"><text:span text:style-name="T170">NAT</text:span><text:span text:style-name="T129"/></text:p>
          </table:table-cell>
          <table:table-cell table:style-name="表格66.A3" office:value-type="string">
            <text:p text:style-name="P25" loext:marker-style-name="T129"><text:span text:style-name="T130">換身份才能上 </text:span><text:span text:style-name="T170">Internet</text:span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29"><text:span text:style-name="T170">⑤ </text:span><text:span text:style-name="T130">傳到 </text:span><text:span text:style-name="T170">Google</text:span></text:p>
          </table:table-cell>
          <table:table-cell table:style-name="表格66.A2" office:value-type="string">
            <text:p text:style-name="P25" loext:marker-style-name="T129"><text:span text:style-name="T340">封包抵達目的地</text:span><text:span text:style-name="T170">(</text:span><text:span text:style-name="T560">Google </text:span><text:span text:style-name="T556">看到公網 </text:span><text:span text:style-name="T560">IP</text:span><text:span text:style-name="T170">)</text:span></text:p>
          </table:table-cell>
          <table:table-cell table:style-name="表格66.A2" office:value-type="string">
            <text:p text:style-name="P25" loext:marker-style-name="T129"><text:span text:style-name="T170">Internet</text:span><text:span text:style-name="T129"/></text:p>
          </table:table-cell>
          <table:table-cell table:style-name="表格66.A2" office:value-type="string">
            <text:p text:style-name="P25" loext:marker-style-name="T129"><text:span text:style-name="T170">Google </text:span><text:span text:style-name="T130">只看到公網 </text:span><text:span text:style-name="T170">IP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29"><text:span text:style-name="T170">⑥ Google </text:span><text:span text:style-name="T130">回應</text:span></text:p>
          </table:table-cell>
          <table:table-cell table:style-name="表格66.A3" office:value-type="string">
            <text:p text:style-name="P25" loext:marker-style-name="T129"><text:span text:style-name="T435">回傳給 </text:span><text:span text:style-name="T470">220.x.x.x</text:span><text:span text:style-name="T170">(</text:span><text:span text:style-name="T563">回到路由器再回到你電腦</text:span><text:span text:style-name="T170">)</text:span></text:p>
          </table:table-cell>
          <table:table-cell table:style-name="表格66.A3" office:value-type="string">
            <text:p text:style-name="P25" loext:marker-style-name="T129"><text:span text:style-name="T170">Internet</text:span><text:span text:style-name="T129"/></text:p>
          </table:table-cell>
          <table:table-cell table:style-name="表格66.A3" office:value-type="string">
            <text:p text:style-name="P25" loext:marker-style-name="T129"><text:span text:style-name="T130">路由器收到回應</text:span><text:span text:style-name="T129"/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29"><text:span text:style-name="T170">⑦ NAT </text:span><text:span text:style-name="T130">回程</text:span></text:p>
          </table:table-cell>
          <table:table-cell table:style-name="表格66.A2" office:value-type="string">
            <text:p text:style-name="P25" loext:marker-style-name="T129"><text:span text:style-name="T469">220.x.x.x → 192.168.1.2</text:span><text:span text:style-name="T170">(</text:span><text:span text:style-name="T385">NAT </text:span><text:span text:style-name="T369">依記錄轉回正確主機</text:span><text:span text:style-name="T170">)</text:span></text:p>
          </table:table-cell>
          <table:table-cell table:style-name="表格66.A2" office:value-type="string">
            <text:p text:style-name="P25" loext:marker-style-name="T129"><text:span text:style-name="T170">NAT</text:span><text:span text:style-name="T129"/></text:p>
          </table:table-cell>
          <table:table-cell table:style-name="表格66.A2" office:value-type="string">
            <text:p text:style-name="P25" loext:marker-style-name="T129"><text:span text:style-name="T130">查記錄，換回真正目標</text:span><text:span text:style-name="T129"/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29"><text:span text:style-name="T170">⑧ </text:span><text:span text:style-name="T130">收到網頁</text:span></text:p>
          </table:table-cell>
          <table:table-cell table:style-name="表格66.A3" office:value-type="string">
            <text:p text:style-name="P25" loext:marker-style-name="T129"><text:span text:style-name="T130">瀏覽器顯示頁面</text:span><text:span text:style-name="T129"/></text:p>
          </table:table-cell>
          <table:table-cell table:style-name="表格66.A3" office:value-type="string">
            <text:p text:style-name="P25" loext:marker-style-name="T129"><text:span text:style-name="T170">—</text:span><text:span text:style-name="T129"/></text:p>
          </table:table-cell>
          <table:table-cell table:style-name="表格66.A3" office:value-type="string">
            <text:p text:style-name="P25" loext:marker-style-name="T129"><text:span text:style-name="T130">一次完整通信結束</text:span><text:span text:style-name="T129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8"><text:span text:style-name="T176">💣 <text:s/></text:span><text:span text:style-name="T198">三個最容易搞錯的地方（考試地雷）</text:span></text:p>
            <text:p text:style-name="P9"><text:span text:style-name="T213">✗ </text:span><text:span text:style-name="T209">以為 </text:span><text:span text:style-name="T213">ARP </text:span><text:span text:style-name="T209">是找 </text:span><text:span text:style-name="T213">Google </text:span><text:span text:style-name="T209">的 </text:span><text:span text:style-name="T213">MAC</text:span><text:span text:style-name="T208">　→　</text:span><text:span text:style-name="T546">✓ </text:span><text:span text:style-name="T548">ARP </text:span><text:span text:style-name="T546">找的是「路由器」的 </text:span><text:span text:style-name="T548">MAC</text:span><text:span text:style-name="T546">！</text:span><text:span text:style-name="T99">因為 </text:span><text:span text:style-name="T148">ARP </text:span><text:span text:style-name="T99">只能在同一個 </text:span><text:span text:style-name="T148">LAN </text:span><text:span text:style-name="T99">內使用。</text:span></text:p>
            <text:p text:style-name="P10"><text:span text:style-name="T213">✗ </text:span><text:span text:style-name="T209">以為封包直接送到 </text:span><text:span text:style-name="T213">Google</text:span><text:span text:style-name="T208">　→　</text:span><text:span text:style-name="T546">✓ 封包先送給路由器，路由器再轉到 </text:span><text:span text:style-name="T548">Internet</text:span><text:span text:style-name="T99">。</text:span></text:p>
            <text:p text:style-name="P10"><text:span text:style-name="T213">✗ </text:span><text:span text:style-name="T209">以為 </text:span><text:span text:style-name="T213">IP </text:span><text:span text:style-name="T209">在傳輸過程中一直不變</text:span><text:span text:style-name="T208">　→　</text:span><text:span text:style-name="T546">✓ </text:span><text:span text:style-name="T548">NAT </text:span><text:span text:style-name="T546">會在去程改掉來源 </text:span><text:span text:style-name="T548">IP</text:span><text:span text:style-name="T546">，回程再改回去</text:span><text:span text:style-name="T9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8"><text:span text:style-name="T176">📝 <text:s/></text:span><text:span text:style-name="T217">考試標準答案（直接背）</text:span></text:p>
            <text:p text:style-name="P9" loext:marker-style-name="T101"><text:span text:style-name="T117">使用者輸入網址後</text:span><text:span text:style-name="T99">，</text:span><text:span text:style-name="T413">先透過 </text:span><text:span text:style-name="T419">DNS </text:span><text:span text:style-name="T413">將網域名稱解析為 </text:span><text:span text:style-name="T419">IP</text:span><text:span text:style-name="T99">；</text:span><text:span text:style-name="T273">接著主機利用 </text:span><text:span text:style-name="T290">ARP </text:span><text:span text:style-name="T273">取得路由器（預設閘道）的 </text:span><text:span text:style-name="T290">MAC</text:span><text:span text:style-name="T99">，</text:span><text:span text:style-name="T273">將封包傳送至路由器</text:span><text:span text:style-name="T99">；</text:span><text:span text:style-name="T484">路由器透過 </text:span><text:span text:style-name="T479">NAT </text:span><text:span text:style-name="T484">將私有 </text:span><text:span text:style-name="T479">IP </text:span><text:span text:style-name="T484">轉換為公網 </text:span><text:span text:style-name="T479">IP </text:span><text:span text:style-name="T484">後送往 </text:span><text:span text:style-name="T479">Internet</text:span><text:span text:style-name="T99">；</text:span><text:span text:style-name="T238">目的主機回應後，路由器再透過 </text:span><text:span text:style-name="T239">NAT </text:span><text:span text:style-name="T238">將封包轉回原內部主機</text:span><text:span text:style-name="T99">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6" loext:marker-style-name="T65"><text:span text:style-name="T74">ARP</text:span><text:span text:style-name="T65"/></text:p>
            </table:table-cell>
            <table:table-cell table:style-name="表格67.A1" office:value-type="string">
              <text:p text:style-name="P6" loext:marker-style-name="T65"><text:span text:style-name="T74">NAT</text:span><text:span text:style-name="T65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 loext:marker-style-name="T78"><text:span text:style-name="T77">目的</text:span><text:span text:style-name="T78"/></text:p>
          </table:table-cell>
          <table:table-cell table:style-name="表格67.A2" office:value-type="string">
            <text:p text:style-name="P25" loext:marker-style-name="T366"><text:span text:style-name="T365">用 </text:span><text:span text:style-name="T356">IP </text:span><text:span text:style-name="T365">找 </text:span><text:span text:style-name="T356">MAC</text:span></text:p>
          </table:table-cell>
          <table:table-cell table:style-name="表格67.A2" office:value-type="string">
            <text:p text:style-name="P25" loext:marker-style-name="T571"><text:span text:style-name="T570">私有 </text:span><text:span text:style-name="T572">IP </text:span><text:span text:style-name="T570">轉成公網 </text:span><text:span text:style-name="T572">IP</text:span></text:p>
          </table:table-cell>
        </table:table-row>
        <table:table-row table:style-name="表格67.1">
          <table:table-cell table:style-name="表格67.A3" office:value-type="string">
            <text:p text:style-name="P25" loext:marker-style-name="T78"><text:span text:style-name="T77">使用範圍</text:span><text:span text:style-name="T78"/></text:p>
          </table:table-cell>
          <table:table-cell table:style-name="表格67.A3" office:value-type="string">
            <text:p text:style-name="P25" loext:marker-style-name="T91"><text:span text:style-name="T90">區域網路（</text:span><text:span text:style-name="T142">LAN</text:span><text:span text:style-name="T90">）內</text:span></text:p>
          </table:table-cell>
          <table:table-cell table:style-name="表格67.A3" office:value-type="string">
            <text:p text:style-name="P25" loext:marker-style-name="T87"><text:span text:style-name="T86">內網與 </text:span><text:span text:style-name="T144">Internet </text:span><text:span text:style-name="T86">之間</text:span></text:p>
          </table:table-cell>
        </table:table-row>
        <table:table-row table:style-name="表格67.1">
          <table:table-cell table:style-name="表格67.A2" office:value-type="string">
            <text:p text:style-name="P25" loext:marker-style-name="T78"><text:span text:style-name="T77">運作層級</text:span><text:span text:style-name="T78"/></text:p>
          </table:table-cell>
          <table:table-cell table:style-name="表格67.A2" office:value-type="string">
            <text:p text:style-name="P25" loext:marker-style-name="T426"><text:span text:style-name="T421">L2 / L3 </text:span><text:span text:style-name="T425">交界</text:span></text:p>
          </table:table-cell>
          <table:table-cell table:style-name="表格67.A2" office:value-type="string">
            <text:p text:style-name="P25" loext:marker-style-name="T428"><text:span text:style-name="T422">L3</text:span><text:span text:style-name="T427">（網路層）</text:span></text:p>
          </table:table-cell>
        </table:table-row>
        <table:table-row table:style-name="表格67.1">
          <table:table-cell table:style-name="表格67.A3" office:value-type="string">
            <text:p text:style-name="P25" loext:marker-style-name="T78"><text:span text:style-name="T77">誰執行</text:span><text:span text:style-name="T78"/></text:p>
          </table:table-cell>
          <table:table-cell table:style-name="表格67.A3" office:value-type="string">
            <text:p text:style-name="P25" loext:marker-style-name="T78"><text:span text:style-name="T77">端點裝置（電腦）</text:span><text:span text:style-name="T78"/></text:p>
          </table:table-cell>
          <table:table-cell table:style-name="表格67.A3" office:value-type="string">
            <text:p text:style-name="P25" loext:marker-style-name="T78"><text:span text:style-name="T77">路由器</text:span><text:span text:style-name="T78"/></text:p>
          </table:table-cell>
        </table:table-row>
        <table:table-row table:style-name="表格67.1">
          <table:table-cell table:style-name="表格67.A2" office:value-type="string">
            <text:p text:style-name="P25" loext:marker-style-name="T78"><text:span text:style-name="T77">主要用途</text:span><text:span text:style-name="T78"/></text:p>
          </table:table-cell>
          <table:table-cell table:style-name="表格67.A2" office:value-type="string">
            <text:p text:style-name="P25" loext:marker-style-name="T78"><text:span text:style-name="T77">在區網內傳送封包</text:span><text:span text:style-name="T78"/></text:p>
          </table:table-cell>
          <table:table-cell table:style-name="表格67.A2" office:value-type="string">
            <text:p text:style-name="P25" loext:marker-style-name="T78"><text:span text:style-name="T77">讓內部主機能夠上網</text:span><text:span text:style-name="T78"/></text:p>
          </table:table-cell>
        </table:table-row>
      </table:table>
      <text:h text:style-name="P13" text:outline-level="1" loext:marker-style-name="T67"><text:span text:style-name="T66">第 五 篇　</text:span><text:span text:style-name="T67">TCP </text:span><text:span text:style-name="T66">傳輸控制深入：握手 </text:span><text:span text:style-name="T67">· SYN Flood · </text:span><text:span text:style-name="T66">視窗 </text:span><text:span text:style-name="T67">· </text:span><text:span text:style-name="T66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8"><text:span text:style-name="T176">🚦 <text:s/></text:span><text:span text:style-name="T47">本篇重點</text:span></text:p>
            <text:p text:style-name="P9" loext:marker-style-name="T101"><text:span text:style-name="T99">網路的本質是把資料從 </text:span><text:span text:style-name="T148">A </text:span><text:span text:style-name="T99">電腦送到 </text:span><text:span text:style-name="T148">B </text:span><text:span text:style-name="T99">電腦，但中間有四個麻煩，</text:span><text:span text:style-name="T148">TCP </text:span><text:span text:style-name="T99">各自有對策。</text:span></text:p>
          </table:table-cell>
        </table:table-row>
      </table:table>
      <text:h text:style-name="P2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6" loext:marker-style-name="T65"><text:span text:style-name="T64">問題</text:span><text:span text:style-name="T65"/></text:p>
            </table:table-cell>
            <table:table-cell table:style-name="表格69.A1" office:value-type="string">
              <text:p text:style-name="P6" loext:marker-style-name="T65"><text:span text:style-name="T64">說明</text:span><text:span text:style-name="T65"/></text:p>
            </table:table-cell>
            <table:table-cell table:style-name="表格69.A1" office:value-type="string">
              <text:p text:style-name="P6" loext:marker-style-name="T65"><text:span text:style-name="T74">TCP </text:span><text:span text:style-name="T64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5" loext:marker-style-name="T91"><text:span text:style-name="T90">資料可能丟失</text:span><text:span text:style-name="T91"/></text:p>
          </table:table-cell>
          <table:table-cell table:style-name="表格69.A2" office:value-type="string">
            <text:p text:style-name="P25" loext:marker-style-name="T78"><text:span text:style-name="T77">封包在網路中消失</text:span><text:span text:style-name="T78"/></text:p>
          </table:table-cell>
          <table:table-cell table:style-name="表格69.A2" office:value-type="string">
            <text:p text:style-name="P25" loext:marker-style-name="T78"><text:span text:style-name="T86">重傳</text:span><text:span text:style-name="T77">機制（</text:span><text:span text:style-name="T138">Retransmission</text:span><text:span text:style-name="T77">）</text:span></text:p>
          </table:table-cell>
        </table:table-row>
        <table:table-row table:style-name="表格69.1">
          <table:table-cell table:style-name="表格69.A3" office:value-type="string">
            <text:p text:style-name="P25" loext:marker-style-name="T91"><text:span text:style-name="T90">順序可能亂掉</text:span><text:span text:style-name="T91"/></text:p>
          </table:table-cell>
          <table:table-cell table:style-name="表格69.A3" office:value-type="string">
            <text:p text:style-name="P25" loext:marker-style-name="T78"><text:span text:style-name="T77">封包走不同路徑先後到達</text:span><text:span text:style-name="T78"/></text:p>
          </table:table-cell>
          <table:table-cell table:style-name="表格69.A3" office:value-type="string">
            <text:p text:style-name="P25" loext:marker-style-name="T78"><text:span text:style-name="T86">序號</text:span><text:span text:style-name="T77">機制（</text:span><text:span text:style-name="T138">Sequence Number</text:span><text:span text:style-name="T77">）</text:span></text:p>
          </table:table-cell>
        </table:table-row>
        <table:table-row table:style-name="表格69.1">
          <table:table-cell table:style-name="表格69.A2" office:value-type="string">
            <text:p text:style-name="P25" loext:marker-style-name="T91"><text:span text:style-name="T90">對方來不及收</text:span><text:span text:style-name="T91"/></text:p>
          </table:table-cell>
          <table:table-cell table:style-name="表格69.A2" office:value-type="string">
            <text:p text:style-name="P25" loext:marker-style-name="T78"><text:span text:style-name="T77">接收端 </text:span><text:span text:style-name="T138">buffer </text:span><text:span text:style-name="T77">可能爆掉</text:span></text:p>
          </table:table-cell>
          <table:table-cell table:style-name="表格69.A2" office:value-type="string">
            <text:p text:style-name="P25" loext:marker-style-name="T78"><text:span text:style-name="T86">流量</text:span><text:span text:style-name="T77">控制（</text:span><text:span text:style-name="T138">Flow Control / rwnd</text:span><text:span text:style-name="T77">）</text:span></text:p>
          </table:table-cell>
        </table:table-row>
        <table:table-row table:style-name="表格69.1">
          <table:table-cell table:style-name="表格69.A3" office:value-type="string">
            <text:p text:style-name="P25" loext:marker-style-name="T91"><text:span text:style-name="T90">網路可能塞車</text:span><text:span text:style-name="T91"/></text:p>
          </table:table-cell>
          <table:table-cell table:style-name="表格69.A3" office:value-type="string">
            <text:p text:style-name="P25" loext:marker-style-name="T78"><text:span text:style-name="T77">路由器排隊太長</text:span><text:span text:style-name="T78"/></text:p>
          </table:table-cell>
          <table:table-cell table:style-name="表格69.A3" office:value-type="string">
            <text:p text:style-name="P25" loext:marker-style-name="T78"><text:span text:style-name="T86">擁塞</text:span><text:span text:style-name="T77">控制（</text:span><text:span text:style-name="T138">Congestion Control / cwnd</text:span><text:span text:style-name="T77">）</text:span></text:p>
          </table:table-cell>
        </table:table-row>
      </table:table>
      <text:h text:style-name="P2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6" loext:marker-style-name="T65"><text:span text:style-name="T64">特性</text:span><text:span text:style-name="T65"/></text:p>
            </table:table-cell>
            <table:table-cell table:style-name="表格70.A1" office:value-type="string">
              <text:p text:style-name="P6" loext:marker-style-name="T65"><text:span text:style-name="T74">TCP</text:span><text:span text:style-name="T64">（可靠模式）</text:span></text:p>
            </table:table-cell>
            <table:table-cell table:style-name="表格70.A1" office:value-type="string">
              <text:p text:style-name="P6" loext:marker-style-name="T65"><text:span text:style-name="T74">UDP</text:span><text:span text:style-name="T64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5" loext:marker-style-name="T78"><text:span text:style-name="T77">連線方式</text:span><text:span text:style-name="T78"/></text:p>
          </table:table-cell>
          <table:table-cell table:style-name="表格70.A2" office:value-type="string">
            <text:p text:style-name="P25" loext:marker-style-name="T364"><text:span text:style-name="T362">需要先建立連線</text:span><text:span text:style-name="T364"/></text:p>
          </table:table-cell>
          <table:table-cell table:style-name="表格70.A2" office:value-type="string">
            <text:p text:style-name="P25" loext:marker-style-name="T257"><text:span text:style-name="T256">無連線，直接送</text:span><text:span text:style-name="T257"/></text:p>
          </table:table-cell>
        </table:table-row>
        <table:table-row table:style-name="表格70.1">
          <table:table-cell table:style-name="表格70.A3" office:value-type="string">
            <text:p text:style-name="P25" loext:marker-style-name="T78"><text:span text:style-name="T77">可靠性</text:span><text:span text:style-name="T78"/></text:p>
          </table:table-cell>
          <table:table-cell table:style-name="表格70.A3" office:value-type="string">
            <text:p text:style-name="P25" loext:marker-style-name="T78"><text:span text:style-name="T77">保證送達（會重傳）</text:span><text:span text:style-name="T78"/></text:p>
          </table:table-cell>
          <table:table-cell table:style-name="表格70.A3" office:value-type="string">
            <text:p text:style-name="P25" loext:marker-style-name="T78"><text:span text:style-name="T77">不保證送達</text:span><text:span text:style-name="T78"/></text:p>
          </table:table-cell>
        </table:table-row>
        <table:table-row table:style-name="表格70.1">
          <table:table-cell table:style-name="表格70.A2" office:value-type="string">
            <text:p text:style-name="P25" loext:marker-style-name="T78"><text:span text:style-name="T77">順序</text:span><text:span text:style-name="T78"/></text:p>
          </table:table-cell>
          <table:table-cell table:style-name="表格70.A2" office:value-type="string">
            <text:p text:style-name="P25" loext:marker-style-name="T78"><text:span text:style-name="T77">保證順序正確</text:span><text:span text:style-name="T78"/></text:p>
          </table:table-cell>
          <table:table-cell table:style-name="表格70.A2" office:value-type="string">
            <text:p text:style-name="P25" loext:marker-style-name="T78"><text:span text:style-name="T77">不保證順序</text:span><text:span text:style-name="T78"/></text:p>
          </table:table-cell>
        </table:table-row>
        <table:table-row table:style-name="表格70.1">
          <table:table-cell table:style-name="表格70.A3" office:value-type="string">
            <text:p text:style-name="P25" loext:marker-style-name="T78"><text:span text:style-name="T77">速度</text:span><text:span text:style-name="T78"/></text:p>
          </table:table-cell>
          <table:table-cell table:style-name="表格70.A3" office:value-type="string">
            <text:p text:style-name="P25" loext:marker-style-name="T78"><text:span text:style-name="T77">較慢（有控制機制）</text:span><text:span text:style-name="T78"/></text:p>
          </table:table-cell>
          <table:table-cell table:style-name="表格70.A3" office:value-type="string">
            <text:p text:style-name="P25" loext:marker-style-name="T78"><text:span text:style-name="T77">較快（無額外開銷）</text:span><text:span text:style-name="T78"/></text:p>
          </table:table-cell>
        </table:table-row>
        <table:table-row table:style-name="表格70.1">
          <table:table-cell table:style-name="表格70.A2" office:value-type="string">
            <text:p text:style-name="P25" loext:marker-style-name="T78"><text:span text:style-name="T77">適合場景</text:span><text:span text:style-name="T78"/></text:p>
          </table:table-cell>
          <table:table-cell table:style-name="表格70.A2" office:value-type="string">
            <text:p text:style-name="P25" loext:marker-style-name="T87"><text:span text:style-name="T86">網頁、檔案傳輸、</text:span><text:span text:style-name="T144">Email</text:span></text:p>
          </table:table-cell>
          <table:table-cell table:style-name="表格70.A2" office:value-type="string">
            <text:p text:style-name="P25" loext:marker-style-name="T78"><text:span text:style-name="T86">直播、遊戲</text:span><text:span text:style-name="T77">、</text:span><text:span text:style-name="T138">DNS </text:span><text:span text:style-name="T77">查詢</text:span></text:p>
          </table:table-cell>
        </table:table-row>
        <table:table-row table:style-name="表格70.1">
          <table:table-cell table:style-name="表格70.A3" office:value-type="string">
            <text:p text:style-name="P25" loext:marker-style-name="T78"><text:span text:style-name="T77">比喻</text:span><text:span text:style-name="T78"/></text:p>
          </table:table-cell>
          <table:table-cell table:style-name="表格70.A3" office:value-type="string">
            <text:p text:style-name="P25" loext:marker-style-name="T91"><text:span text:style-name="T90">專業物流（簽收確認）</text:span><text:span text:style-name="T91"/></text:p>
          </table:table-cell>
          <table:table-cell table:style-name="表格70.A3" office:value-type="string">
            <text:p text:style-name="P25" loext:marker-style-name="T91"><text:span text:style-name="T90">亂丟紙飛機</text:span><text:span text:style-name="T91"/></text:p>
          </table:table-cell>
        </table:table-row>
      </table:table>
      <text:h text:style-name="P2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8"><text:span text:style-name="T176">🤝 <text:s/></text:span><text:span text:style-name="T47">握手流程</text:span></text:p>
            <text:p text:style-name="P9"><text:span text:style-name="T60">① Client → Server</text:span><text:span text:style-name="T51">：</text:span><text:span text:style-name="T59">SYN</text:span><text:span text:style-name="T51">　</text:span><text:span text:style-name="T99">「我可以傳資料給你嗎？我準備好了。」（</text:span><text:span text:style-name="T148">Synchronize </text:span><text:span text:style-name="T99">同步請求）</text:span></text:p>
            <text:p text:style-name="P10"><text:span text:style-name="T60">② Server → Client</text:span><text:span text:style-name="T51">：</text:span><text:span text:style-name="T59">SYN + ACK</text:span><text:span text:style-name="T51">　</text:span><text:span text:style-name="T99">「可以！我收到你的請求了，我也準備好了。」（確認＋同步）</text:span></text:p>
            <text:p text:style-name="P10"><text:span text:style-name="T60">③ Client → Server</text:span><text:span text:style-name="T51">：</text:span><text:span text:style-name="T59">ACK</text:span><text:span text:style-name="T51">　</text:span><text:span text:style-name="T9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8"><text:span text:style-name="T176">🎯 <text:s/></text:span><text:span text:style-name="T226">三次握手真正目的（考試必考）</text:span></text:p>
            <text:p text:style-name="P9" loext:marker-style-name="T101"><text:span text:style-name="T99">確認雙向都能傳資料（</text:span><text:span text:style-name="T148">Client → Server </text:span><text:span text:style-name="T99">和 </text:span><text:span text:style-name="T148">Server → Client </text:span><text:span text:style-name="T99">各自驗證）。</text:span></text:p>
            <text:p text:style-name="P10" loext:marker-style-name="T101"><text:span text:style-name="T573">避免「</text:span><text:span text:style-name="T485">舊封包誤觸發新連線</text:span><text:span text:style-name="T573">」</text:span><text:span text:style-name="T99">：若少一次確認，</text:span><text:span text:style-name="T272">延遲的舊 </text:span><text:span text:style-name="T289">SYN </text:span><text:span text:style-name="T272">封包可能讓 </text:span><text:span text:style-name="T289">Server </text:span><text:span text:style-name="T272">誤以為要建立新連線</text:span><text:span text:style-name="T99">。</text:span></text:p>
          </table:table-cell>
        </table:table-row>
      </table:table>
      <text:h text:style-name="P2" text:outline-level="2" loext:marker-style-name="T27"><text:span text:style-name="T28">四、攻擊：</text:span><text:span text:style-name="T27">SYN Flood</text:span></text:h>
      <text:p text:style-name="P32" loext:marker-style-name="T101"><text:span text:style-name="T99">攻擊原理：攻擊者大量發送 </text:span><text:span text:style-name="T148">SYN </text:span><text:span text:style-name="T99">封包，但</text:span><text:span text:style-name="T338">故意不完成第三次握手（</text:span><text:span text:style-name="T266">不回 </text:span><text:span text:style-name="T283">ACK</text:span><text:span text:style-name="T338">）</text:span><text:span text:style-name="T99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2" loext:marker-style-name="T65"><text:span text:style-name="T64">步驟</text:span><text:span text:style-name="T65"/></text:p>
            </table:table-cell>
            <table:table-cell table:style-name="表格72.A1" office:value-type="string">
              <text:p text:style-name="P22" loext:marker-style-name="T65"><text:span text:style-name="T64">發生什麼</text:span><text:span text:style-name="T65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 loext:marker-style-name="T78"><text:span text:style-name="T138">1</text:span><text:span text:style-name="T78"/></text:p>
          </table:table-cell>
          <table:table-cell table:style-name="表格72.A2" office:value-type="string">
            <text:p text:style-name="P25" loext:marker-style-name="T78"><text:span text:style-name="T77">攻擊者</text:span><text:span text:style-name="T90">送出大量 </text:span><text:span text:style-name="T142">SYN</text:span><text:span text:style-name="T77">，每個都</text:span><text:span text:style-name="T86">假冒不同來源 </text:span><text:span text:style-name="T144">IP</text:span></text:p>
          </table:table-cell>
        </table:table-row>
        <table:table-row table:style-name="表格72.1">
          <table:table-cell table:style-name="表格72.A3" office:value-type="string">
            <text:p text:style-name="P25" loext:marker-style-name="T78"><text:span text:style-name="T138">2</text:span><text:span text:style-name="T78"/></text:p>
          </table:table-cell>
          <table:table-cell table:style-name="表格72.A3" office:value-type="string">
            <text:p text:style-name="P25" loext:marker-style-name="T78"><text:span text:style-name="T540">Server </text:span><text:span text:style-name="T531">建立「半連線（</text:span><text:span text:style-name="T540">Half-open Connection</text:span><text:span text:style-name="T531">）」</text:span><text:span text:style-name="T77">，</text:span><text:span text:style-name="T441">每個都佔記憶體等待 </text:span><text:span text:style-name="T45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5" loext:marker-style-name="T78"><text:span text:style-name="T138">3</text:span><text:span text:style-name="T78"/></text:p>
          </table:table-cell>
          <table:table-cell table:style-name="表格72.A2" office:value-type="string">
            <text:p text:style-name="P25" loext:marker-style-name="T78"><text:span text:style-name="T558">攻擊者永遠不回 </text:span><text:span text:style-name="T561">ACK</text:span><text:span text:style-name="T77">，</text:span><text:span text:style-name="T138">Server </text:span><text:span text:style-name="T77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5" loext:marker-style-name="T78"><text:span text:style-name="T138">4</text:span><text:span text:style-name="T78"/></text:p>
          </table:table-cell>
          <table:table-cell table:style-name="表格72.A3" office:value-type="string">
            <text:p text:style-name="P25" loext:marker-style-name="T78"><text:span text:style-name="T90">正常用戶連線失敗</text:span><text:span text:style-name="T77">，</text:span><text:span text:style-name="T138">Server </text:span><text:span text:style-name="T77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8"><text:span text:style-name="T176">⚠️ <text:s/></text:span><text:span text:style-name="T198">本質</text:span></text:p>
            <text:p text:style-name="P9" loext:marker-style-name="T101"><text:span text:style-name="T99">這是一種 </text:span><text:span text:style-name="T160">DoS</text:span><text:span text:style-name="T117">（拒絕服務）攻擊</text:span><text:span text:style-name="T99">，利用 </text:span><text:span text:style-name="T148">TCP </text:span><text:span text:style-name="T99">三次握手機制的不對稱性。</text:span></text:p>
          </table:table-cell>
          <table:covered-table-cell/>
        </table:table-row>
      </table:table>
      <text:h text:style-name="P2" text:outline-level="2" loext:marker-style-name="T27"><text:span text:style-name="T28">五、傳送速度的兩個限制：</text:span><text:span text:style-name="T456">rwnd</text:span><text:span text:style-name="T27"> </text:span><text:span text:style-name="T28">與 </text:span><text:span text:style-name="T456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2" loext:marker-style-name="T65"><text:span text:style-name="T74">rwnd</text:span><text:span text:style-name="T64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2" loext:marker-style-name="T65"><text:span text:style-name="T74">cwnd</text:span><text:span text:style-name="T64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5" loext:marker-style-name="T78"><text:span text:style-name="T77">接收端的限制。</text:span><text:span text:style-name="T532">對方 </text:span><text:span text:style-name="T541">buffer</text:span><text:span text:style-name="T532">（暫存區）還剩多少空間</text:span><text:span text:style-name="T77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5" loext:marker-style-name="T78"><text:span text:style-name="T77">網路的限制。發送端根據網路狀況自行估計，</text:span><text:span text:style-name="T362">目前網路最多能承受多少資料量</text:span><text:span text:style-name="T77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9"><text:span text:style-name="T231">實際傳送量 ＝ </text:span><text:span text:style-name="T235">min(rwnd, cwnd)</text:span><text:span text:style-name="T227">　</text:span><text:span text:style-name="T115">取兩者最小值</text:span><text:span text:style-name="T99">。</text:span><text:span text:style-name="T123">對方吃不下就看 </text:span><text:span text:style-name="T166">rwnd</text:span><text:span text:style-name="T123">；網路塞就看 </text:span><text:span text:style-name="T166">cwnd</text:span><text:span text:style-name="T9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2" loext:marker-style-name="T65"><text:span text:style-name="T64">情境</text:span><text:span text:style-name="T65"/></text:p>
          </table:table-cell>
          <table:table-cell table:style-name="表格73.A1" office:value-type="string">
            <text:p text:style-name="P22" loext:marker-style-name="T65"><text:span text:style-name="T74">cwnd</text:span><text:span text:style-name="T65"/></text:p>
          </table:table-cell>
          <table:table-cell table:style-name="表格73.A1" table:number-columns-spanned="2" office:value-type="string">
            <text:p text:style-name="P22" loext:marker-style-name="T65"><text:span text:style-name="T74">rwnd</text:span><text:span text:style-name="T65"/></text:p>
          </table:table-cell>
          <table:covered-table-cell/>
          <table:table-cell table:style-name="表格73.A1" office:value-type="string">
            <text:p text:style-name="P22" loext:marker-style-name="T65"><text:span text:style-name="T64">實際傳送量</text:span><text:span text:style-name="T65"/></text:p>
          </table:table-cell>
          <table:table-cell table:style-name="表格73.A1" office:value-type="string">
            <text:p text:style-name="P22" loext:marker-style-name="T65"><text:span text:style-name="T64">瓶頸原因</text:span><text:span text:style-name="T65"/></text:p>
          </table:table-cell>
        </table:table-row>
        <table:table-row table:style-name="表格73.1">
          <table:table-cell table:style-name="表格73.A2" office:value-type="string">
            <text:p text:style-name="P25" loext:marker-style-name="T78"><text:span text:style-name="T77">對方 </text:span><text:span text:style-name="T138">buffer </text:span><text:span text:style-name="T77">快滿了</text:span></text:p>
          </table:table-cell>
          <table:table-cell table:style-name="表格73.A2" office:value-type="string">
            <text:p text:style-name="P25" loext:marker-style-name="T78"><text:span text:style-name="T138">10</text:span><text:span text:style-name="T78"/></text:p>
          </table:table-cell>
          <table:table-cell table:style-name="表格73.A2" table:number-columns-spanned="2" office:value-type="string">
            <text:p text:style-name="P25" loext:marker-style-name="T78"><text:span text:style-name="T138">3</text:span><text:span text:style-name="T78"/></text:p>
          </table:table-cell>
          <table:covered-table-cell/>
          <table:table-cell table:style-name="表格73.A2" office:value-type="string">
            <text:p text:style-name="P25" loext:marker-style-name="T78"><text:span text:style-name="T138">3</text:span><text:span text:style-name="T78"/></text:p>
          </table:table-cell>
          <table:table-cell table:style-name="表格73.A2" office:value-type="string">
            <text:p text:style-name="P25" loext:marker-style-name="T78"><text:span text:style-name="T77">接收端限制（</text:span><text:span text:style-name="T138">rwnd</text:span><text:span text:style-name="T77">）</text:span></text:p>
          </table:table-cell>
        </table:table-row>
        <table:table-row table:style-name="表格73.1">
          <table:table-cell table:style-name="表格73.A6" office:value-type="string">
            <text:p text:style-name="P25" loext:marker-style-name="T78"><text:span text:style-name="T77">網路很塞</text:span><text:span text:style-name="T78"/></text:p>
          </table:table-cell>
          <table:table-cell table:style-name="表格73.A6" office:value-type="string">
            <text:p text:style-name="P25" loext:marker-style-name="T78"><text:span text:style-name="T138">2</text:span><text:span text:style-name="T78"/></text:p>
          </table:table-cell>
          <table:table-cell table:style-name="表格73.A6" table:number-columns-spanned="2" office:value-type="string">
            <text:p text:style-name="P25" loext:marker-style-name="T78"><text:span text:style-name="T138">10</text:span><text:span text:style-name="T78"/></text:p>
          </table:table-cell>
          <table:covered-table-cell/>
          <table:table-cell table:style-name="表格73.A6" office:value-type="string">
            <text:p text:style-name="P25" loext:marker-style-name="T78"><text:span text:style-name="T138">2</text:span><text:span text:style-name="T78"/></text:p>
          </table:table-cell>
          <table:table-cell table:style-name="表格73.A6" office:value-type="string">
            <text:p text:style-name="P25" loext:marker-style-name="T78"><text:span text:style-name="T77">網路限制（</text:span><text:span text:style-name="T138">cwnd</text:span><text:span text:style-name="T77">）</text:span></text:p>
          </table:table-cell>
        </table:table-row>
        <table:table-row table:style-name="表格73.1">
          <table:table-cell table:style-name="表格73.A2" office:value-type="string">
            <text:p text:style-name="P25" loext:marker-style-name="T78"><text:span text:style-name="T77">兩者相近</text:span><text:span text:style-name="T78"/></text:p>
          </table:table-cell>
          <table:table-cell table:style-name="表格73.A2" office:value-type="string">
            <text:p text:style-name="P25" loext:marker-style-name="T78"><text:span text:style-name="T138">5</text:span><text:span text:style-name="T78"/></text:p>
          </table:table-cell>
          <table:table-cell table:style-name="表格73.A2" table:number-columns-spanned="2" office:value-type="string">
            <text:p text:style-name="P25" loext:marker-style-name="T78"><text:span text:style-name="T138">6</text:span><text:span text:style-name="T78"/></text:p>
          </table:table-cell>
          <table:covered-table-cell/>
          <table:table-cell table:style-name="表格73.A2" office:value-type="string">
            <text:p text:style-name="P25" loext:marker-style-name="T78"><text:span text:style-name="T138">5</text:span><text:span text:style-name="T78"/></text:p>
          </table:table-cell>
          <table:table-cell table:style-name="表格73.A2" office:value-type="string">
            <text:p text:style-name="P25" loext:marker-style-name="T78"><text:span text:style-name="T77">網路限制（</text:span><text:span text:style-name="T138">cwnd</text:span><text:span text:style-name="T77">）</text:span></text:p>
          </table:table-cell>
        </table:table-row>
      </table:table>
      <text:h text:style-name="P2" text:outline-level="2" loext:marker-style-name="T27"><text:span text:style-name="T28">六、滑動視窗（</text:span><text:span text:style-name="T27">Sliding Window</text:span><text:span text:style-name="T28">）</text:span></text:h>
      <text:p text:style-name="P32" loext:marker-style-name="T101"><text:span text:style-name="T102">最笨的方法：送 </text:span><text:span text:style-name="T149">1 </text:span><text:span text:style-name="T102">個封包 → 等 </text:span><text:span text:style-name="T149">ACK → </text:span><text:span text:style-name="T102">再送 </text:span><text:span text:style-name="T149">1 </text:span><text:span text:style-name="T102">個 → 等 </text:span><text:span text:style-name="T149">ACK</text:span><text:span text:style-name="T99">，</text:span><text:span text:style-name="T485">大部分時間在閒置，非常浪費</text:span><text:span text:style-name="T99">。</text:span><text:span text:style-name="T160">TCP </text:span><text:span text:style-name="T117">的改進</text:span><text:span text:style-name="T99">：</text:span><text:span text:style-name="T574">不用等 </text:span><text:span text:style-name="T578">ACK</text:span><text:span text:style-name="T574">，先連續送出多個封包讓封包都在網路上飛（</text:span><text:span text:style-name="T578">in-flight</text:span><text:span text:style-name="T574">），</text:span><text:span text:style-name="T578">ACK </text:span><text:span text:style-name="T574">再慢慢回來</text:span><text:span text:style-name="T99">，這就是 </text:span><text:span text:style-name="T148">pipeline</text:span><text:span text:style-name="T99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9"><text:span text:style-name="T214">✗ </text:span><text:span text:style-name="T208">常見錯誤：</text:span><text:span text:style-name="T99">視窗 </text:span><text:span text:style-name="T148">= cwnd</text:span><text:span text:style-name="T99">（擁塞視窗）。</text:span><text:span text:style-name="T218">✓ 正確：</text:span><text:span text:style-name="T272">視窗 </text:span><text:span text:style-name="T289">= min(cwnd, rwnd)</text:span><text:span text:style-name="T272">，</text:span><text:span text:style-name="T289">cwnd </text:span><text:span text:style-name="T27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6" loext:marker-style-name="T65"><text:span text:style-name="T64">時間點</text:span><text:span text:style-name="T65"/></text:p>
          </table:table-cell>
          <table:table-cell table:style-name="表格74.A2" office:value-type="string">
            <text:p text:style-name="P6" loext:marker-style-name="T65"><text:span text:style-name="T64">已確認</text:span><text:span text:style-name="T65"/></text:p>
          </table:table-cell>
          <table:table-cell table:style-name="表格74.A2" office:value-type="string">
            <text:p text:style-name="P6" loext:marker-style-name="T65"><text:span text:style-name="T64">視窗範圍（可送）</text:span><text:span text:style-name="T65"/></text:p>
          </table:table-cell>
          <table:table-cell table:style-name="表格74.A2" office:value-type="string">
            <text:p text:style-name="P6" loext:marker-style-name="T65"><text:span text:style-name="T64">等待中</text:span><text:span text:style-name="T65"/></text:p>
          </table:table-cell>
        </table:table-row>
        <table:table-row table:style-name="表格74.1">
          <table:table-cell table:style-name="表格74.A3" office:value-type="string">
            <text:p text:style-name="P25" loext:marker-style-name="T78"><text:span text:style-name="T77">初始狀態</text:span><text:span text:style-name="T78"/></text:p>
          </table:table-cell>
          <table:table-cell table:style-name="表格74.A3" office:value-type="string">
            <text:p text:style-name="P25" loext:marker-style-name="T78"><text:span text:style-name="T77">無</text:span><text:span text:style-name="T78"/></text:p>
          </table:table-cell>
          <table:table-cell table:style-name="表格74.A3" office:value-type="string">
            <text:p text:style-name="P25" loext:marker-style-name="T78"><text:span text:style-name="T77">封包 </text:span><text:span text:style-name="T138">1, 2, 3</text:span></text:p>
          </table:table-cell>
          <table:table-cell table:style-name="表格74.A3" office:value-type="string">
            <text:p text:style-name="P25" loext:marker-style-name="T78"><text:span text:style-name="T138">4, 5, 6 …</text:span><text:span text:style-name="T78"/></text:p>
          </table:table-cell>
        </table:table-row>
        <table:table-row table:style-name="表格74.1">
          <table:table-cell table:style-name="表格74.A4" office:value-type="string">
            <text:p text:style-name="P25" loext:marker-style-name="T92"><text:span text:style-name="T93">收到 </text:span><text:span text:style-name="T143">ACK 1</text:span></text:p>
          </table:table-cell>
          <table:table-cell table:style-name="表格74.A4" office:value-type="string">
            <text:p text:style-name="P25" loext:marker-style-name="T98"><text:span text:style-name="T97">封包 </text:span><text:span text:style-name="T147">1</text:span></text:p>
          </table:table-cell>
          <table:table-cell table:style-name="表格74.A4" office:value-type="string">
            <text:p text:style-name="P25" loext:marker-style-name="T78"><text:span text:style-name="T77">封包 </text:span><text:span text:style-name="T138">2, 3, 4</text:span></text:p>
          </table:table-cell>
          <table:table-cell table:style-name="表格74.A4" office:value-type="string">
            <text:p text:style-name="P25" loext:marker-style-name="T78"><text:span text:style-name="T138">5, 6 …</text:span><text:span text:style-name="T77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5" loext:marker-style-name="T92"><text:span text:style-name="T93">收到 </text:span><text:span text:style-name="T143">ACK 2</text:span></text:p>
          </table:table-cell>
          <table:table-cell table:style-name="表格74.A3" office:value-type="string">
            <text:p text:style-name="P25" loext:marker-style-name="T98"><text:span text:style-name="T97">封包 </text:span><text:span text:style-name="T147">1, 2</text:span></text:p>
          </table:table-cell>
          <table:table-cell table:style-name="表格74.A3" office:value-type="string">
            <text:p text:style-name="P25" loext:marker-style-name="T78"><text:span text:style-name="T77">封包 </text:span><text:span text:style-name="T138">3, 4, 5</text:span></text:p>
          </table:table-cell>
          <table:table-cell table:style-name="表格74.A3" office:value-type="string">
            <text:p text:style-name="P25" loext:marker-style-name="T78"><text:span text:style-name="T138">6, 7 …</text:span><text:span text:style-name="T77">（繼續往右滑）</text:span></text:p>
          </table:table-cell>
        </table:table-row>
      </table:table>
      <text:p text:style-name="P32" loext:marker-style-name="T11"><text:span text:style-name="T10">關鍵理解：視窗大小決定效率（越大越快），</text:span><text:span text:style-name="T564">ACK </text:span><text:span text:style-name="T562">的回傳決定視窗位置（往前滑）</text:span><text:span text:style-name="T10">，兩者合作讓傳輸保持流暢。</text:span></text:p>
      <text:h text:style-name="P2" text:outline-level="2" loext:marker-style-name="T27"><text:span text:style-name="T28">七、擁塞控制：怎麼調整速度</text:span><text:span text:style-name="T27"/></text:h>
      <text:h text:style-name="P3" text:outline-level="3"><text:span text:style-name="T178">▍</text:span><text:span text:style-name="T179"> </text:span><text:span text:style-name="T180">階段一：</text:span><text:span text:style-name="T179">Slow Start</text:span><text:span text:style-name="T180">（慢啟動）— 指數成長</text:span></text:h>
      <text:p text:style-name="P32" loext:marker-style-name="T101"><text:span text:style-name="T99">雖叫「慢」啟動，實際成長非常快。規則：</text:span><text:span text:style-name="T448">每收到一個 </text:span><text:span text:style-name="T464">ACK</text:span><text:span text:style-name="T448">，</text:span><text:span text:style-name="T464">cwnd </text:span><text:span text:style-name="T448">就 </text:span><text:span text:style-name="T464">+1</text:span><text:span text:style-name="T99">；</text:span><text:span text:style-name="T522">送出 </text:span><text:span text:style-name="T535">N </text:span><text:span text:style-name="T522">個封包 → 收回 </text:span><text:span text:style-name="T535">N </text:span><text:span text:style-name="T522">個 </text:span><text:span text:style-name="T535">ACK → cwnd </text:span><text:span text:style-name="T522">增加 </text:span><text:span text:style-name="T535">N</text:span><text:span text:style-name="T99">，所以每輪自然翻倍。</text:span><text:span text:style-name="T148">(</text:span><text:span text:style-name="T289">Slow Start = </text:span><text:span text:style-name="T272">每一輪變 </text:span><text:span text:style-name="T289">2 </text:span><text:span text:style-name="T272">倍，</text:span><text:span text:style-name="T289">Congestion Avoidance = </text:span><text:span text:style-name="T272">每一輪只加 </text:span><text:span text:style-name="T289">1</text:span><text:span text:style-name="T148">(</text:span><text:span text:style-name="T99">「</text:span><text:span text:style-name="T480">Slow Start</text:span><text:span text:style-name="T486">翻倍，壅塞避免加一</text:span><text:span text:style-name="T99">」</text:span><text:span text:style-name="T148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2" loext:marker-style-name="T65"><text:span text:style-name="T64">輪次（</text:span><text:span text:style-name="T74">RTT</text:span><text:span text:style-name="T64">）</text:span></text:p>
            </table:table-cell>
            <table:table-cell table:style-name="表格75.A1" office:value-type="string">
              <text:p text:style-name="P22" loext:marker-style-name="T65"><text:span text:style-name="T74">cwnd</text:span><text:span text:style-name="T65"/></text:p>
            </table:table-cell>
            <table:table-cell table:style-name="表格75.A1" office:value-type="string">
              <text:p text:style-name="P22" loext:marker-style-name="T65"><text:span text:style-name="T64">送出封包數</text:span><text:span text:style-name="T65"/></text:p>
            </table:table-cell>
            <table:table-cell table:style-name="表格75.A1" office:value-type="string">
              <text:p text:style-name="P22" loext:marker-style-name="T65"><text:span text:style-name="T64">收回 </text:span><text:span text:style-name="T74">ACK </text:span><text:span text:style-name="T64">數</text:span></text:p>
            </table:table-cell>
            <table:table-cell table:style-name="表格75.A1" office:value-type="string">
              <text:p text:style-name="P22" loext:marker-style-name="T65"><text:span text:style-name="T64">新 </text:span><text:span text:style-name="T74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5" loext:marker-style-name="T78"><text:span text:style-name="T77">第 </text:span><text:span text:style-name="T138">1 </text:span><text:span text:style-name="T77">輪</text:span></text:p>
          </table:table-cell>
          <table:table-cell table:style-name="表格75.A2" office:value-type="string">
            <text:p text:style-name="P25" loext:marker-style-name="T78"><text:span text:style-name="T138">1</text:span><text:span text:style-name="T78"/></text:p>
          </table:table-cell>
          <table:table-cell table:style-name="表格75.A2" office:value-type="string">
            <text:p text:style-name="P25" loext:marker-style-name="T78"><text:span text:style-name="T138">1</text:span><text:span text:style-name="T78"/></text:p>
          </table:table-cell>
          <table:table-cell table:style-name="表格75.A2" office:value-type="string">
            <text:p text:style-name="P25" loext:marker-style-name="T78"><text:span text:style-name="T138">1</text:span><text:span text:style-name="T78"/></text:p>
          </table:table-cell>
          <table:table-cell table:style-name="表格75.A2" office:value-type="string">
            <text:p text:style-name="P25" loext:marker-style-name="T78"><text:span text:style-name="T138">2</text:span><text:span text:style-name="T78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5" loext:marker-style-name="T78"><text:span text:style-name="T77">第 </text:span><text:span text:style-name="T138">2 </text:span><text:span text:style-name="T77">輪</text:span></text:p>
          </table:table-cell>
          <table:table-cell table:style-name="表格75.A3" office:value-type="string">
            <text:p text:style-name="P25" loext:marker-style-name="T78"><text:span text:style-name="T138">2</text:span><text:span text:style-name="T78"/></text:p>
          </table:table-cell>
          <table:table-cell table:style-name="表格75.A3" office:value-type="string">
            <text:p text:style-name="P25" loext:marker-style-name="T78"><text:span text:style-name="T138">2</text:span><text:span text:style-name="T78"/></text:p>
          </table:table-cell>
          <table:table-cell table:style-name="表格75.A3" office:value-type="string">
            <text:p text:style-name="P25" loext:marker-style-name="T78"><text:span text:style-name="T138">2</text:span><text:span text:style-name="T78"/></text:p>
          </table:table-cell>
          <table:table-cell table:style-name="表格75.A3" office:value-type="string">
            <text:p text:style-name="P25" loext:marker-style-name="T78"><text:span text:style-name="T138">4</text:span><text:span text:style-name="T78"/></text:p>
          </table:table-cell>
        </table:table-row>
        <table:table-row table:style-name="表格75.1">
          <table:table-cell table:style-name="表格75.A2" office:value-type="string">
            <text:p text:style-name="P25" loext:marker-style-name="T78"><text:span text:style-name="T77">第 </text:span><text:span text:style-name="T138">3 </text:span><text:span text:style-name="T77">輪</text:span></text:p>
          </table:table-cell>
          <table:table-cell table:style-name="表格75.A2" office:value-type="string">
            <text:p text:style-name="P25" loext:marker-style-name="T78"><text:span text:style-name="T138">4</text:span><text:span text:style-name="T78"/></text:p>
          </table:table-cell>
          <table:table-cell table:style-name="表格75.A2" office:value-type="string">
            <text:p text:style-name="P25" loext:marker-style-name="T78"><text:span text:style-name="T138">4</text:span><text:span text:style-name="T78"/></text:p>
          </table:table-cell>
          <table:table-cell table:style-name="表格75.A2" office:value-type="string">
            <text:p text:style-name="P25" loext:marker-style-name="T78"><text:span text:style-name="T138">4</text:span><text:span text:style-name="T78"/></text:p>
          </table:table-cell>
          <table:table-cell table:style-name="表格75.A2" office:value-type="string">
            <text:p text:style-name="P25" loext:marker-style-name="T78"><text:span text:style-name="T138">8</text:span><text:span text:style-name="T78"/></text:p>
          </table:table-cell>
        </table:table-row>
        <table:table-row table:style-name="表格75.1">
          <table:table-cell table:style-name="表格75.A3" office:value-type="string">
            <text:p text:style-name="P25" loext:marker-style-name="T78"><text:span text:style-name="T77">第 </text:span><text:span text:style-name="T138">4 </text:span><text:span text:style-name="T77">輪</text:span></text:p>
          </table:table-cell>
          <table:table-cell table:style-name="表格75.A3" office:value-type="string">
            <text:p text:style-name="P25" loext:marker-style-name="T78"><text:span text:style-name="T138">8</text:span><text:span text:style-name="T78"/></text:p>
          </table:table-cell>
          <table:table-cell table:style-name="表格75.A3" office:value-type="string">
            <text:p text:style-name="P25" loext:marker-style-name="T78"><text:span text:style-name="T138">8</text:span><text:span text:style-name="T78"/></text:p>
          </table:table-cell>
          <table:table-cell table:style-name="表格75.A3" office:value-type="string">
            <text:p text:style-name="P25" loext:marker-style-name="T78"><text:span text:style-name="T138">8</text:span><text:span text:style-name="T78"/></text:p>
          </table:table-cell>
          <table:table-cell table:style-name="表格75.A3" office:value-type="string">
            <text:p text:style-name="P25" loext:marker-style-name="T78"><text:span text:style-name="T138">16</text:span><text:span text:style-name="T78"/></text:p>
          </table:table-cell>
        </table:table-row>
      </table:table>
      <text:h text:style-name="P3" text:outline-level="3"><text:span text:style-name="T178">▍</text:span><text:span text:style-name="T179"> </text:span><text:span text:style-name="T180">階段二：</text:span><text:span text:style-name="T179">Congestion Avoidance</text:span><text:span text:style-name="T180">（擁塞避免）— 線性成長</text:span></text:h>
      <text:p text:style-name="P32" loext:marker-style-name="T101"><text:span text:style-name="T393">cwnd </text:span><text:span text:style-name="T381">成長到門檻值（</text:span><text:span text:style-name="T393">ssthresh</text:span><text:span text:style-name="T381">）後，改為線性成長</text:span><text:span text:style-name="T99">（</text:span><text:span text:style-name="T448">每個 </text:span><text:span text:style-name="T464">RTT </text:span><text:span text:style-name="T448">只 </text:span><text:span text:style-name="T464">+1</text:span><text:span text:style-name="T99">），</text:span><text:span text:style-name="T115">避免增長太快讓網路過載</text:span><text:span text:style-name="T99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6" loext:marker-style-name="T65"><text:span text:style-name="T74">Slow Start</text:span><text:span text:style-name="T65"/></text:p>
            </table:table-cell>
            <table:table-cell table:style-name="表格76.A1" office:value-type="string">
              <text:p text:style-name="P6" loext:marker-style-name="T65"><text:span text:style-name="T74">Congestion Avoidance</text:span><text:span text:style-name="T65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5" loext:marker-style-name="T78"><text:span text:style-name="T77">觸發條件</text:span><text:span text:style-name="T78"/></text:p>
          </table:table-cell>
          <table:table-cell table:style-name="表格76.A2" office:value-type="string">
            <text:p text:style-name="P25" loext:marker-style-name="T92"><text:span text:style-name="T143">cwnd &lt; ssthresh</text:span><text:span text:style-name="T92"/></text:p>
          </table:table-cell>
          <table:table-cell table:style-name="表格76.A2" office:value-type="string">
            <text:p text:style-name="P25" loext:marker-style-name="T92"><text:span text:style-name="T143">cwnd ≥ ssthresh</text:span><text:span text:style-name="T92"/></text:p>
          </table:table-cell>
        </table:table-row>
        <table:table-row table:style-name="表格76.1">
          <table:table-cell table:style-name="表格76.A3" office:value-type="string">
            <text:p text:style-name="P25" loext:marker-style-name="T78"><text:span text:style-name="T77">成長方式</text:span><text:span text:style-name="T78"/></text:p>
          </table:table-cell>
          <table:table-cell table:style-name="表格76.A3" office:value-type="string">
            <text:p text:style-name="P25" loext:marker-style-name="T78"><text:span text:style-name="T533">指數成長</text:span><text:span text:style-name="T77">（</text:span><text:span text:style-name="T443">每個 </text:span><text:span text:style-name="T460">ACK +1</text:span><text:span text:style-name="T77">）</text:span></text:p>
          </table:table-cell>
          <table:table-cell table:style-name="表格76.A3" office:value-type="string">
            <text:p text:style-name="P25" loext:marker-style-name="T78"><text:span text:style-name="T558">線性成長</text:span><text:span text:style-name="T77">（</text:span><text:span text:style-name="T443">每個 </text:span><text:span text:style-name="T460">RTT +1</text:span><text:span text:style-name="T77">）</text:span><text:span text:style-name="T138">(</text:span><text:span text:style-name="T579">RTT </text:span><text:span text:style-name="T575">：</text:span><text:span text:style-name="T579">Round Trip Time</text:span><text:span text:style-name="T575">（往返時間）</text:span><text:span text:style-name="T579">= </text:span><text:span text:style-name="T575">封包出去 </text:span><text:span text:style-name="T579">+ ACK </text:span><text:span text:style-name="T575">回來的一個來回時間</text:span><text:span text:style-name="T138">)</text:span></text:p>
          </table:table-cell>
        </table:table-row>
        <table:table-row table:style-name="表格76.1">
          <table:table-cell table:style-name="表格76.A2" office:value-type="string">
            <text:p text:style-name="P25" loext:marker-style-name="T78"><text:span text:style-name="T77">特性</text:span><text:span text:style-name="T78"/></text:p>
          </table:table-cell>
          <table:table-cell table:style-name="表格76.A2" office:value-type="string">
            <text:p text:style-name="P25" loext:marker-style-name="T78"><text:span text:style-name="T77">快速試探網路上限</text:span><text:span text:style-name="T78"/></text:p>
          </table:table-cell>
          <table:table-cell table:style-name="表格76.A2" office:value-type="string">
            <text:p text:style-name="P25" loext:marker-style-name="T78"><text:span text:style-name="T77">保守維持穩定傳輸</text:span><text:span text:style-name="T78"/></text:p>
          </table:table-cell>
        </table:table-row>
      </table:table>
      <text:h text:style-name="P3" text:outline-level="3"><text:span text:style-name="T178">▍</text:span><text:span text:style-name="T179"> </text:span><text:span text:style-name="T180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6" loext:marker-style-name="T71"><text:span text:style-name="T70">丟包偵測方式</text:span><text:span text:style-name="T71"/></text:p>
            </table:table-cell>
            <table:table-cell table:style-name="表格77.A1" office:value-type="string">
              <text:p text:style-name="P6" loext:marker-style-name="T71"><text:span text:style-name="T70">說明</text:span><text:span text:style-name="T71"/></text:p>
            </table:table-cell>
            <table:table-cell table:style-name="表格77.A1" office:value-type="string">
              <text:p text:style-name="P6" loext:marker-style-name="T71"><text:span text:style-name="T76">ssthresh</text:span><text:span text:style-name="T71"/></text:p>
            </table:table-cell>
            <table:table-cell table:style-name="表格77.A1" office:value-type="string">
              <text:p text:style-name="P6" loext:marker-style-name="T71"><text:span text:style-name="T76">cwnd</text:span><text:span text:style-name="T71"/></text:p>
            </table:table-cell>
            <table:table-cell table:style-name="表格77.A1" office:value-type="string">
              <text:p text:style-name="P6" loext:marker-style-name="T71"><text:span text:style-name="T70">下一階段</text:span><text:span text:style-name="T71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5" loext:marker-style-name="T134"><text:span text:style-name="T172">Timeout</text:span><text:span text:style-name="T133">（逾時）</text:span></text:p>
          </table:table-cell>
          <table:table-cell table:style-name="表格77.A2" office:value-type="string">
            <text:p text:style-name="P25" loext:marker-style-name="T129"><text:span text:style-name="T131">等太久沒 </text:span><text:span text:style-name="T171">ACK</text:span><text:span text:style-name="T130">，</text:span><text:span text:style-name="T262">網路嚴重擁塞</text:span></text:p>
          </table:table-cell>
          <table:table-cell table:style-name="表格77.A2" office:value-type="string">
            <text:p text:style-name="P25" loext:marker-style-name="T129"><text:span text:style-name="T170">= </text:span><text:span text:style-name="T298">cwnd / 2</text:span></text:p>
          </table:table-cell>
          <table:table-cell table:style-name="表格77.A2" office:value-type="string">
            <text:p text:style-name="P25" loext:marker-style-name="T204"><text:span text:style-name="T203">重設為 </text:span><text:span text:style-name="T210">1</text:span></text:p>
          </table:table-cell>
          <table:table-cell table:style-name="表格77.A2" office:value-type="string">
            <text:p text:style-name="P25" loext:marker-style-name="T312"><text:span text:style-name="T311">重新進入 </text:span><text:span text:style-name="T323">Slow Start</text:span></text:p>
          </table:table-cell>
        </table:table-row>
        <table:table-row table:style-name="表格77.1">
          <table:table-cell table:style-name="表格77.A3" office:value-type="string">
            <text:p text:style-name="P25" loext:marker-style-name="T134"><text:span text:style-name="T172">3 </text:span><text:span text:style-name="T133">個重複 </text:span><text:span text:style-name="T172">ACK (Fast Retransmit)</text:span></text:p>
          </table:table-cell>
          <table:table-cell table:style-name="表格77.A3" office:value-type="string">
            <text:p text:style-name="P25" loext:marker-style-name="T129"><text:span text:style-name="T131">連續收 </text:span><text:span text:style-name="T171">3 </text:span><text:span text:style-name="T131">個同樣 </text:span><text:span text:style-name="T171">ACK</text:span><text:span text:style-name="T130">，</text:span><text:span text:style-name="T371">單一封包丟失</text:span></text:p>
          </table:table-cell>
          <table:table-cell table:style-name="表格77.A3" office:value-type="string">
            <text:p text:style-name="P25" loext:marker-style-name="T129"><text:span text:style-name="T170">= </text:span><text:span text:style-name="T298">cwnd / 2</text:span></text:p>
          </table:table-cell>
          <table:table-cell table:style-name="表格77.A3" office:value-type="string">
            <text:p text:style-name="P25" loext:marker-style-name="T31"><text:span text:style-name="T39">= ssthresh</text:span><text:span text:style-name="T32">（直接減半）</text:span></text:p>
          </table:table-cell>
          <table:table-cell table:style-name="表格77.A3" office:value-type="string">
            <text:p text:style-name="P25" loext:marker-style-name="T312"><text:span text:style-name="T311">進入 </text:span><text:span text:style-name="T323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8"><text:span text:style-name="T176">⚠️ <text:s/></text:span><text:span text:style-name="T198">重要區別</text:span></text:p>
            <text:p text:style-name="P9" loext:marker-style-name="T101"><text:span text:style-name="T568">Timeout </text:span><text:span text:style-name="T565">代表網路嚴重問題</text:span><text:span text:style-name="T99">，</text:span><text:span text:style-name="T537">cwnd </text:span><text:span text:style-name="T525">重設回 </text:span><text:span text:style-name="T537">1 </text:span><text:span text:style-name="T525">從頭來</text:span><text:span text:style-name="T99">；</text:span><text:span text:style-name="T581">3 </text:span><text:span text:style-name="T582">個重複 </text:span><text:span text:style-name="T581">ACK </text:span><text:span text:style-name="T582">只是單一封包遺失</text:span><text:span text:style-name="T99">，</text:span><text:span text:style-name="T537">cwnd </text:span><text:span text:style-name="T525">直接減半後繼續 </text:span><text:span text:style-name="T537">Congestion Avoidance</text:span><text:span text:style-name="T525">，不用從頭重來</text:span><text:span text:style-name="T99">。</text:span><text:span text:style-name="T148">(</text:span><text:span text:style-name="T292">Timeout → cwnd = 1</text:span><text:span text:style-name="T275">；</text:span><text:span text:style-name="T292">3Dup ACK → cwnd ÷ 2</text:span><text:span text:style-name="T148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AIMD</text:span><text:span text:style-name="T180">（加法增長 </text:span><text:span text:style-name="T179">/ </text:span><text:span text:style-name="T180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2" loext:marker-style-name="T65"><text:span text:style-name="T74">AI</text:span><text:span text:style-name="T64">：加法增長 </text:span><text:span text:style-name="T74">Additive Increase</text:span></text:p>
            </table:table-cell>
            <table:table-cell table:style-name="表格78.A1" office:value-type="string">
              <text:p text:style-name="P22" loext:marker-style-name="T65"><text:span text:style-name="T74">MD</text:span><text:span text:style-name="T64">：乘法減少 </text:span><text:span text:style-name="T74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5" loext:marker-style-name="T78"><text:span text:style-name="T86">沒丟包 → 網路 </text:span><text:span text:style-name="T144">OK </text:span><text:span text:style-name="T138">→ CA </text:span><text:span text:style-name="T77">階段線性增加（</text:span><text:span text:style-name="T90">每 </text:span><text:span text:style-name="T142">RTT +1</text:span><text:span text:style-name="T77">），慢慢加速。</text:span></text:p>
          </table:table-cell>
          <table:table-cell table:style-name="表格78.A2" office:value-type="string">
            <text:p text:style-name="P25" loext:marker-style-name="T78"><text:span text:style-name="T86">偵測到丟包 → 網路塞了 </text:span><text:span text:style-name="T77">→ </text:span><text:span text:style-name="T142">cwnd ×0.5</text:span><text:span text:style-name="T90">（減半）</text:span><text:span text:style-name="T77">，快速降速避免繼續惡化。</text:span></text:p>
          </table:table-cell>
        </table:table-row>
      </table:table>
      <text:p text:style-name="P32" loext:marker-style-name="T11"><text:span text:style-name="T467">AIMD </text:span><text:span text:style-name="T451">本質：用 </text:span><text:span text:style-name="T467">ACK </text:span><text:span text:style-name="T451">當回饋，不斷探測網路的「最高速度」</text:span><text:span text:style-name="T10">——</text:span><text:span text:style-name="T313">慢慢加速找上限，遇到問題快速減速再重新找</text:span><text:span text:style-name="T10">，這個循環就是 </text:span><text:span text:style-name="T20">TCP </text:span><text:span text:style-name="T10">傳輸的節奏。</text:span></text:p>
      <text:h text:style-name="P2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8"><text:span text:style-name="T176">🔄 <text:s/></text:span><text:span text:style-name="T47">完整流程</text:span></text:p>
            <text:p text:style-name="P9" loext:marker-style-name="T101"><text:span text:style-name="T148">① </text:span><text:span text:style-name="T99">建立連線：三次握手（</text:span><text:span text:style-name="T148">SYN → SYN+ACK → ACK</text:span><text:span text:style-name="T99">）確認雙向通訊正常。</text:span></text:p>
            <text:p text:style-name="P10" loext:marker-style-name="T101"><text:span text:style-name="T148">② </text:span><text:span text:style-name="T99">開始傳資料 </text:span><text:span text:style-name="T148">Slow Start</text:span><text:span text:style-name="T99">：</text:span><text:span text:style-name="T148">cwnd </text:span><text:span text:style-name="T99">從 </text:span><text:span text:style-name="T148">1 </text:span><text:span text:style-name="T99">開始，每個 </text:span><text:span text:style-name="T148">ACK +1</text:span><text:span text:style-name="T99">，指數成長快速試探上限。</text:span></text:p>
            <text:p text:style-name="P10" loext:marker-style-name="T101"><text:span text:style-name="T148">③ </text:span><text:span text:style-name="T99">達到門檻切換 </text:span><text:span text:style-name="T148">CA</text:span><text:span text:style-name="T99">：</text:span><text:span text:style-name="T148">cwnd </text:span><text:span text:style-name="T99">到 </text:span><text:span text:style-name="T148">ssthresh </text:span><text:span text:style-name="T99">後改每 </text:span><text:span text:style-name="T148">RTT +1</text:span><text:span text:style-name="T99">，線性保守維持穩定。（</text:span><text:span text:style-name="T148">RTT</text:span><text:span text:style-name="T99">＝來回時間：送出一個封包到收到 </text:span><text:span text:style-name="T148">ACK </text:span><text:span text:style-name="T99">所花的時間）</text:span></text:p>
            <text:p text:style-name="P10" loext:marker-style-name="T101"><text:span text:style-name="T148">④ </text:span><text:span text:style-name="T99">每輪都考慮兩個限制：實際傳送量 </text:span><text:span text:style-name="T148">= min(rwnd, cwnd)</text:span><text:span text:style-name="T99">。</text:span></text:p>
            <text:p text:style-name="P10" loext:marker-style-name="T101"><text:span text:style-name="T148">⑤ </text:span><text:span text:style-name="T99">視窗持續滑動：每收到一個 </text:span><text:span text:style-name="T148">ACK </text:span><text:span text:style-name="T99">視窗往前移，保持 </text:span><text:span text:style-name="T148">pipeline </text:span><text:span text:style-name="T99">流暢。</text:span></text:p>
            <text:p text:style-name="P10" loext:marker-style-name="T101"><text:span text:style-name="T148">⑥ </text:span><text:span text:style-name="T99">偵測到丟包快速反應：</text:span><text:span text:style-name="T148">Timeout → cwnd=1 </text:span><text:span text:style-name="T99">重回 </text:span><text:span text:style-name="T148">Slow Start</text:span><text:span text:style-name="T99">；</text:span><text:span text:style-name="T148">3 </text:span><text:span text:style-name="T99">重複 </text:span><text:span text:style-name="T148">ACK → cwnd </text:span><text:span text:style-name="T99">減半續 </text:span><text:span text:style-name="T148">CA</text:span><text:span text:style-name="T99">。</text:span></text:p>
            <text:p text:style-name="P10" loext:marker-style-name="T101"><text:span text:style-name="T148">⑦ </text:span><text:span text:style-name="T99">持續循環調整：送 → 收 </text:span><text:span text:style-name="T148">ACK → </text:span><text:span text:style-name="T99">調整 </text:span><text:span text:style-name="T148">cwnd → </text:span><text:span text:style-name="T99">再送，</text:span><text:span text:style-name="T448">用 </text:span><text:span text:style-name="T464">ACK </text:span><text:span text:style-name="T448">當回饋不斷自我調節</text:span><text:span text:style-name="T99">。</text:span></text:p>
          </table:table-cell>
        </table:table-row>
      </table:table>
      <text:h text:style-name="P2" text:outline-level="2" loext:marker-style-name="T281"><text:soft-page-break/><text:span text:style-name="T281">TCP </text:span><text:span text:style-name="T282">七字口訣 <text:s text:c="2"/>握</text:span><text:span text:style-name="T281">(</text:span><text:span text:style-name="T282">三次握手</text:span><text:span text:style-name="T281">) → </text:span><text:span text:style-name="T282">衝</text:span><text:span text:style-name="T281">(Slow Start </text:span><text:span text:style-name="T282">指數成長</text:span><text:span text:style-name="T281">) → </text:span><text:span text:style-name="T282">穩</text:span><text:span text:style-name="T281">(CA </text:span><text:span text:style-name="T282">線性成長</text:span><text:span text:style-name="T281">) → </text:span><text:span text:style-name="T282">看</text:span><text:span text:style-name="T281">(min(rwnd,cwnd)) → </text:span><text:span text:style-name="T282">滑</text:span><text:span text:style-name="T281">(Sliding Window) → </text:span><text:span text:style-name="T282">救</text:span><text:span text:style-name="T281">(Timeout / 3 Dup ACK) → </text:span><text:span text:style-name="T282">循</text:span><text:span text:style-name="T281">(ACK </text:span><text:span text:style-name="T282">回饋循環</text:span><text:span text:style-name="T281">)</text:span></text:h>
      <text:h text:style-name="P15" text:outline-level="2" loext:marker-style-name="T27"/>
      <text:h text:style-name="P2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6" loext:marker-style-name="T65"><text:span text:style-name="T64">步驟</text:span><text:span text:style-name="T65"/></text:p>
            </table:table-cell>
            <table:table-cell table:style-name="表格80.A1" office:value-type="string">
              <text:p text:style-name="P6" loext:marker-style-name="T65"><text:span text:style-name="T64">發生什麼</text:span><text:span text:style-name="T65"/></text:p>
            </table:table-cell>
            <table:table-cell table:style-name="表格80.A1" office:value-type="string">
              <text:p text:style-name="P6" loext:marker-style-name="T65"><text:span text:style-name="T64">用到什麼</text:span><text:span text:style-name="T65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 loext:marker-style-name="T78"><text:span text:style-name="T138">DNS </text:span><text:span text:style-name="T77">解析</text:span></text:p>
          </table:table-cell>
          <table:table-cell table:style-name="表格80.A2" office:value-type="string">
            <text:p text:style-name="P25" loext:marker-style-name="T78"><text:span text:style-name="T138">google.com → 142.250.x.x</text:span><text:span text:style-name="T78"/></text:p>
          </table:table-cell>
          <table:table-cell table:style-name="表格80.A2" office:value-type="string">
            <text:p text:style-name="P25" loext:marker-style-name="T78"><text:span text:style-name="T138">DNS</text:span><text:span text:style-name="T78"/></text:p>
          </table:table-cell>
        </table:table-row>
        <table:table-row table:style-name="表格80.1">
          <table:table-cell table:style-name="表格80.A3" office:value-type="string">
            <text:p text:style-name="P25" loext:marker-style-name="T78"><text:span text:style-name="T138">ARP </text:span><text:span text:style-name="T77">找路由器</text:span></text:p>
          </table:table-cell>
          <table:table-cell table:style-name="表格80.A3" office:value-type="string">
            <text:p text:style-name="P25" loext:marker-style-name="T78"><text:span text:style-name="T77">找路由器的 </text:span><text:span text:style-name="T138">MAC </text:span><text:span text:style-name="T77">位址</text:span></text:p>
          </table:table-cell>
          <table:table-cell table:style-name="表格80.A3" office:value-type="string">
            <text:p text:style-name="P25" loext:marker-style-name="T78"><text:span text:style-name="T138">ARP</text:span><text:span text:style-name="T78"/></text:p>
          </table:table-cell>
        </table:table-row>
        <table:table-row table:style-name="表格80.1">
          <table:table-cell table:style-name="表格80.A2" office:value-type="string">
            <text:p text:style-name="P25" loext:marker-style-name="T78"><text:span text:style-name="T138">NAT</text:span><text:span text:style-name="T78"/></text:p>
          </table:table-cell>
          <table:table-cell table:style-name="表格80.A2" office:value-type="string">
            <text:p text:style-name="P25" loext:marker-style-name="T78"><text:span text:style-name="T77">私有 </text:span><text:span text:style-name="T138">IP </text:span><text:span text:style-name="T77">換成公網 </text:span><text:span text:style-name="T138">IP</text:span></text:p>
          </table:table-cell>
          <table:table-cell table:style-name="表格80.A2" office:value-type="string">
            <text:p text:style-name="P25" loext:marker-style-name="T78"><text:span text:style-name="T138">NAT</text:span><text:span text:style-name="T78"/></text:p>
          </table:table-cell>
        </table:table-row>
        <table:table-row table:style-name="表格80.1">
          <table:table-cell table:style-name="表格80.A3" office:value-type="string">
            <text:p text:style-name="P25" loext:marker-style-name="T78"><text:span text:style-name="T138">TCP </text:span><text:span text:style-name="T77">三次握手</text:span></text:p>
          </table:table-cell>
          <table:table-cell table:style-name="表格80.A3" office:value-type="string">
            <text:p text:style-name="P25" loext:marker-style-name="T78"><text:span text:style-name="T77">與 </text:span><text:span text:style-name="T138">Google </text:span><text:span text:style-name="T77">建立可靠連線</text:span></text:p>
          </table:table-cell>
          <table:table-cell table:style-name="表格80.A3" office:value-type="string">
            <text:p text:style-name="P25" loext:marker-style-name="T78"><text:span text:style-name="T138">TCP</text:span><text:span text:style-name="T78"/></text:p>
          </table:table-cell>
        </table:table-row>
        <table:table-row table:style-name="表格80.1">
          <table:table-cell table:style-name="表格80.A2" office:value-type="string">
            <text:p text:style-name="P25" loext:marker-style-name="T78"><text:span text:style-name="T77">傳資料（</text:span><text:span text:style-name="T138">Slow Start → CA</text:span><text:span text:style-name="T77">）</text:span></text:p>
          </table:table-cell>
          <table:table-cell table:style-name="表格80.A2" office:value-type="string">
            <text:p text:style-name="P25" loext:marker-style-name="T78"><text:span text:style-name="T138">cwnd </text:span><text:span text:style-name="T77">慢慢加速，滑動視窗持續傳送</text:span></text:p>
          </table:table-cell>
          <table:table-cell table:style-name="表格80.A2" office:value-type="string">
            <text:p text:style-name="P25" loext:marker-style-name="T78"><text:span text:style-name="T138">TCP </text:span><text:span text:style-name="T77">擁塞控制</text:span></text:p>
          </table:table-cell>
        </table:table-row>
        <table:table-row table:style-name="表格80.1">
          <table:table-cell table:style-name="表格80.A3" office:value-type="string">
            <text:p text:style-name="P25" loext:marker-style-name="T78"><text:span text:style-name="T138">Google </text:span><text:span text:style-name="T77">回應</text:span></text:p>
          </table:table-cell>
          <table:table-cell table:style-name="表格80.A3" office:value-type="string">
            <text:p text:style-name="P25" loext:marker-style-name="T78"><text:span text:style-name="T77">資料送回你的電腦</text:span><text:span text:style-name="T78"/></text:p>
          </table:table-cell>
          <table:table-cell table:style-name="表格80.A3" office:value-type="string">
            <text:p text:style-name="P25" loext:marker-style-name="T78"><text:span text:style-name="T138">TCP + NAT</text:span><text:span text:style-name="T77">（回程換 </text:span><text:span text:style-name="T138">IP</text:span><text:span text:style-name="T77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8"><text:span text:style-name="T176">⚡ <text:s/></text:span><text:span text:style-name="T180">層次關係</text:span></text:p>
            <text:p text:style-name="P9" loext:marker-style-name="T101"><text:span text:style-name="T148">ARP </text:span><text:span text:style-name="T99">在 </text:span><text:span text:style-name="T148">L2/L3 </text:span><text:span text:style-name="T99">交界處工作（找 </text:span><text:span text:style-name="T148">MAC</text:span><text:span text:style-name="T99">）；</text:span><text:span text:style-name="T148">NAT </text:span><text:span text:style-name="T99">在 </text:span><text:span text:style-name="T148">L3</text:span><text:span text:style-name="T99">（換 </text:span><text:span text:style-name="T148">IP</text:span><text:span text:style-name="T99">）；</text:span><text:span text:style-name="T148">TCP </text:span><text:span text:style-name="T99">在 </text:span><text:span text:style-name="T148">L4</text:span><text:span text:style-name="T99">（控制傳輸）。三者各司其職，合作完成一次上網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8"><text:span text:style-name="T176">🧠 <text:s/></text:span><text:span text:style-name="T226">考試直接用</text:span></text:p>
            <text:p text:style-name="P9" loext:marker-style-name="T101"><text:span text:style-name="T148">TCP </text:span><text:span text:style-name="T99">用三次握手建立連線，</text:span><text:span text:style-name="T117">用 </text:span><text:span text:style-name="T160">rwnd</text:span><text:span text:style-name="T117">（接收端）和 </text:span><text:span text:style-name="T160">cwnd</text:span><text:span text:style-name="T117">（網路）雙重限制控制傳送速度</text:span><text:span text:style-name="T99">，透過 </text:span><text:span text:style-name="T148">Slow Start </text:span><text:span text:style-name="T99">指數試探、</text:span><text:span text:style-name="T148">Congestion Avoidance </text:span><text:span text:style-name="T99">線性增長、丟包後快速降速，</text:span><text:span text:style-name="T338">持續用 </text:span><text:span text:style-name="T343">ACK </text:span><text:span text:style-name="T338">當回饋調節</text:span><text:span text:style-name="T99">，確保資料可靠且高效地傳達。</text:span></text:p>
          </table:table-cell>
        </table:table-row>
      </table:table>
      <text:h text:style-name="P13" text:outline-level="1" loext:marker-style-name="T67"><text:span text:style-name="T66">第 六 篇　</text:span><text:span text:style-name="T67">DNS </text:span><text:span text:style-name="T66">與 </text:span><text:span text:style-name="T67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"><text:span text:style-name="T176">💡 <text:s/></text:span><text:span text:style-name="T58">DNS </text:span><text:span text:style-name="T47">是什麼？</text:span></text:p>
            <text:p text:style-name="P9" loext:marker-style-name="T101"><text:span text:style-name="T148">DNS </text:span><text:span text:style-name="T99">就像「網路電話簿」。人類習慣記名字（</text:span><text:span text:style-name="T148">google.com</text:span><text:span text:style-name="T99">），但電腦只認識號碼（</text:span><text:span text:style-name="T148">IP </text:span><text:span text:style-name="T99">位址），</text:span><text:span text:style-name="T148">DNS </text:span><text:span text:style-name="T99">的工作就是幫你查出對應的號碼。全名 </text:span><text:span text:style-name="T148">Domain Name System</text:span><text:span text:style-name="T99">，是負責將「網域名稱」轉換為「</text:span><text:span text:style-name="T148">IP </text:span><text:span text:style-name="T99">位址」的分散式系統。</text:span></text:p>
          </table:table-cell>
        </table:table-row>
      </table:table>
      <text:h text:style-name="P2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6" loext:marker-style-name="T65"><text:span text:style-name="T64">類型</text:span><text:span text:style-name="T65"/></text:p>
            </table:table-cell>
            <table:table-cell table:style-name="表格83.A1" office:value-type="string">
              <text:p text:style-name="P6" loext:marker-style-name="T65"><text:span text:style-name="T64">全名</text:span><text:span text:style-name="T65"/></text:p>
            </table:table-cell>
            <table:table-cell table:style-name="表格83.A1" office:value-type="string">
              <text:p text:style-name="P6" loext:marker-style-name="T65"><text:span text:style-name="T64">用途</text:span><text:span text:style-name="T65"/></text:p>
            </table:table-cell>
            <table:table-cell table:style-name="表格83.A1" office:value-type="string">
              <text:p text:style-name="P6" loext:marker-style-name="T65"><text:span text:style-name="T64">範例</text:span><text:span text:style-name="T65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 loext:marker-style-name="T87"><text:span text:style-name="T144">A</text:span><text:span text:style-name="T87"/></text:p>
          </table:table-cell>
          <table:table-cell table:style-name="表格83.A2" office:value-type="string">
            <text:p text:style-name="P25" loext:marker-style-name="T91"><text:span text:style-name="T142">Address Record</text:span><text:span text:style-name="T91"/></text:p>
          </table:table-cell>
          <table:table-cell table:style-name="表格83.A2" office:value-type="string">
            <text:p text:style-name="P25" loext:marker-style-name="T78"><text:span text:style-name="T77">網域名稱 → </text:span><text:span text:style-name="T355">IPv4 </text:span><text:span text:style-name="T362">位址</text:span></text:p>
          </table:table-cell>
          <table:table-cell table:style-name="表格83.A2" office:value-type="string">
            <text:p text:style-name="P25" loext:marker-style-name="T78"><text:span text:style-name="T138">google.com → 142.250.x.x</text:span><text:span text:style-name="T78"/></text:p>
          </table:table-cell>
        </table:table-row>
        <table:table-row table:style-name="表格83.1">
          <table:table-cell table:style-name="表格83.A3" office:value-type="string">
            <text:p text:style-name="P25" loext:marker-style-name="T87"><text:span text:style-name="T144">NS</text:span><text:span text:style-name="T87"/></text:p>
          </table:table-cell>
          <table:table-cell table:style-name="表格83.A3" office:value-type="string">
            <text:p text:style-name="P25" loext:marker-style-name="T91"><text:span text:style-name="T142">Name Server</text:span><text:span text:style-name="T91"/></text:p>
          </table:table-cell>
          <table:table-cell table:style-name="表格83.A3" office:value-type="string">
            <text:p text:style-name="P25" loext:marker-style-name="T78"><text:span text:style-name="T77">指定</text:span><text:span text:style-name="T258">管理該網域的 </text:span><text:span text:style-name="T138">DNS </text:span><text:span text:style-name="T77">伺服器</text:span></text:p>
          </table:table-cell>
          <table:table-cell table:style-name="表格83.A3" office:value-type="string">
            <text:p text:style-name="P25" loext:marker-style-name="T78"><text:span text:style-name="T138">google.com → ns1.google.com</text:span><text:span text:style-name="T78"/></text:p>
          </table:table-cell>
        </table:table-row>
        <table:table-row table:style-name="表格83.1">
          <table:table-cell table:style-name="表格83.A2" office:value-type="string">
            <text:p text:style-name="P25" loext:marker-style-name="T87"><text:span text:style-name="T144">MX</text:span><text:span text:style-name="T87"/></text:p>
          </table:table-cell>
          <table:table-cell table:style-name="表格83.A2" office:value-type="string">
            <text:p text:style-name="P25" loext:marker-style-name="T91"><text:span text:style-name="T142">Mail Exchange</text:span><text:span text:style-name="T91"/></text:p>
          </table:table-cell>
          <table:table-cell table:style-name="表格83.A2" office:value-type="string">
            <text:p text:style-name="P25" loext:marker-style-name="T78"><text:span text:style-name="T77">指定</text:span><text:span text:style-name="T533">負責收發郵件的</text:span><text:span text:style-name="T77">伺服器</text:span></text:p>
          </table:table-cell>
          <table:table-cell table:style-name="表格83.A2" office:value-type="string">
            <text:p text:style-name="P25" loext:marker-style-name="T78"><text:span text:style-name="T138">google.com → mail.google.com</text:span><text:span text:style-name="T78"/></text:p>
          </table:table-cell>
        </table:table-row>
        <table:table-row table:style-name="表格83.1">
          <table:table-cell table:style-name="表格83.A3" office:value-type="string">
            <text:p text:style-name="P25" loext:marker-style-name="T87"><text:span text:style-name="T144">CNAME</text:span><text:span text:style-name="T87"/></text:p>
          </table:table-cell>
          <table:table-cell table:style-name="表格83.A3" office:value-type="string">
            <text:p text:style-name="P25" loext:marker-style-name="T91"><text:span text:style-name="T142">Canonical Name</text:span><text:span text:style-name="T91"/></text:p>
          </table:table-cell>
          <table:table-cell table:style-name="表格83.A3" office:value-type="string">
            <text:p text:style-name="P25" loext:marker-style-name="T576"><text:span text:style-name="T575">設定網域別名，指向另一個網域</text:span><text:span text:style-name="T576"/></text:p>
          </table:table-cell>
          <table:table-cell table:style-name="表格83.A3" office:value-type="string">
            <text:p text:style-name="P25" loext:marker-style-name="T78"><text:span text:style-name="T138">www → google.com</text:span><text:span text:style-name="T78"/></text:p>
          </table:table-cell>
        </table:table-row>
      </table:table>
      <text:p text:style-name="P32" loext:marker-style-name="T7"><text:span text:style-name="T6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6">）</text:span></text:p>
      <text:h text:style-name="P2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8"><text:span text:style-name="T176">📚 <text:s/></text:span><text:span text:style-name="T47">圖書館找書比喻</text:span></text:p>
            <text:p text:style-name="P9" loext:marker-style-name="T101"><text:span text:style-name="T99">你要找一本書，書名叫「</text:span><text:span text:style-name="T148">google.com</text:span><text:span text:style-name="T99">」：</text:span></text:p>
            <text:p text:style-name="P10" loext:marker-style-name="T101"><text:span text:style-name="T148">① </text:span><text:span text:style-name="T99">先翻自己的筆記本（</text:span><text:span text:style-name="T148">Cache</text:span><text:span text:style-name="T99">）→ 記得放哪就直接去</text:span></text:p>
            <text:p text:style-name="P10" loext:marker-style-name="T101"><text:span text:style-name="T148">② </text:span><text:span text:style-name="T99">問圖書館員（</text:span><text:span text:style-name="T148">Local DNS</text:span><text:span text:style-name="T99">）→「你知道這本書嗎？」</text:span></text:p>
            <text:p text:style-name="P10" loext:marker-style-name="T101"><text:span text:style-name="T148">③ </text:span><text:span text:style-name="T99">館員問館長（</text:span><text:span text:style-name="T148">Root DNS</text:span><text:span text:style-name="T99">）→「這本是哪個分類？」→「外文區」</text:span></text:p>
            <text:p text:style-name="P10" loext:marker-style-name="T101"><text:span text:style-name="T148">④ </text:span><text:span text:style-name="T99">去外文區管理員（</text:span><text:span text:style-name="T148">TLD</text:span><text:span text:style-name="T99">：</text:span><text:span text:style-name="T148">.com</text:span><text:span text:style-name="T99">）→「</text:span><text:span text:style-name="T148">google </text:span><text:span text:style-name="T99">在哪個書架？」</text:span></text:p>
            <text:p text:style-name="P10" loext:marker-style-name="T101"><text:span text:style-name="T148">⑤ </text:span><text:span text:style-name="T99">書架管理員（</text:span><text:span text:style-name="T148">Authoritative DNS</text:span><text:span text:style-name="T99">）→ 直接給你確切位置（</text:span><text:span text:style-name="T148">IP</text:span><text:span text:style-name="T99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2" loext:marker-style-name="T71"><text:span text:style-name="T70">步驟</text:span><text:span text:style-name="T71"/></text:p>
          </table:table-cell>
          <table:table-cell table:style-name="表格84.A2" office:value-type="string">
            <text:p text:style-name="P22" loext:marker-style-name="T71"><text:span text:style-name="T70">層級</text:span><text:span text:style-name="T71"/></text:p>
          </table:table-cell>
          <table:table-cell table:style-name="表格84.A2" office:value-type="string">
            <text:p text:style-name="P22" loext:marker-style-name="T71"><text:span text:style-name="T70">說明</text:span><text:span text:style-name="T71"/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29"><text:span text:style-name="T170">1</text:span><text:span text:style-name="T129"/></text:p>
          </table:table-cell>
          <table:table-cell table:style-name="表格84.A3" office:value-type="string">
            <text:p text:style-name="P25" loext:marker-style-name="T433"><text:span text:style-name="T432">本機快取（</text:span><text:span text:style-name="T469">Cache</text:span><text:span text:style-name="T432">）</text:span></text:p>
          </table:table-cell>
          <table:table-cell table:style-name="表格84.A3" office:value-type="string">
            <text:p text:style-name="P25" loext:marker-style-name="T557"><text:span text:style-name="T556">先檢查電腦或瀏覽器有無記住此網址的 </text:span><text:span text:style-name="T560">IP</text:span><text:span text:style-name="T556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29"><text:span text:style-name="T170">2</text:span><text:span text:style-name="T129"/></text:p>
          </table:table-cell>
          <table:table-cell table:style-name="表格84.A4" office:value-type="string">
            <text:p text:style-name="P25" loext:marker-style-name="T261"><text:span text:style-name="T297">Local DNS </text:span><text:span text:style-name="T260">伺服器</text:span></text:p>
          </table:table-cell>
          <table:table-cell table:style-name="表格84.A4" office:value-type="string">
            <text:p text:style-name="P25" loext:marker-style-name="T129"><text:span text:style-name="T130">向 </text:span><text:span text:style-name="T171">ISP</text:span><text:span text:style-name="T131">（如中華電信）</text:span><text:span text:style-name="T130">或</text:span><text:span text:style-name="T131">自設 </text:span><text:span text:style-name="T171">DNS</text:span><text:span text:style-name="T131">（如 </text:span><text:span text:style-name="T171">8.8.8.8</text:span><text:span text:style-name="T131">）</text:span><text:span text:style-name="T130">查詢。</text:span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29"><text:span text:style-name="T170">3</text:span><text:span text:style-name="T129"/></text:p>
          </table:table-cell>
          <table:table-cell table:style-name="表格84.A3" office:value-type="string">
            <text:p text:style-name="P25" loext:marker-style-name="T529"><text:span text:style-name="T538">Root DNS </text:span><text:span text:style-name="T528">伺服器</text:span></text:p>
          </table:table-cell>
          <table:table-cell table:style-name="表格84.A3" office:value-type="string">
            <text:p text:style-name="P25" loext:marker-style-name="T129"><text:span text:style-name="T504">全球共 </text:span><text:span text:style-name="T517">13 </text:span><text:span text:style-name="T504">組根 </text:span><text:span text:style-name="T517">DNS</text:span><text:span text:style-name="T130">。不知道答案，但</text:span><text:span text:style-name="T133">會指向對應的 </text:span><text:span text:style-name="T172">TLD DNS</text:span><text:span text:style-name="T130">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29"><text:span text:style-name="T170">4</text:span><text:span text:style-name="T129"/></text:p>
          </table:table-cell>
          <table:table-cell table:style-name="表格84.A4" office:value-type="string">
            <text:p text:style-name="P25" loext:marker-style-name="T370"><text:span text:style-name="T385">TLD DNS </text:span><text:span text:style-name="T369">伺服器</text:span></text:p>
          </table:table-cell>
          <table:table-cell table:style-name="表格84.A4" office:value-type="string">
            <text:p text:style-name="P25" loext:marker-style-name="T129"><text:span text:style-name="T130">負責</text:span><text:span text:style-name="T577">管理頂層網域（</text:span><text:span text:style-name="T580">.com</text:span><text:span text:style-name="T577">、</text:span><text:span text:style-name="T580">.tw</text:span><text:span text:style-name="T577">）</text:span><text:span text:style-name="T130">。</text:span><text:span text:style-name="T133">回應 </text:span><text:span text:style-name="T172">Authoritative DNS </text:span><text:span text:style-name="T133">的位置。</text:span><text:span text:style-name="T259">「</text:span><text:span text:style-name="T298">TLD </text:span><text:span text:style-name="T259">是 </text:span><text:span text:style-name="T298">Top-Level Domain</text:span><text:span text:style-name="T259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29"><text:span text:style-name="T170">5</text:span><text:span text:style-name="T129"/></text:p>
          </table:table-cell>
          <table:table-cell table:style-name="表格84.A3" office:value-type="string">
            <text:p text:style-name="P25" loext:marker-style-name="T567"><text:span text:style-name="T569">Authoritative DNS</text:span><text:span text:style-name="T567"/></text:p>
          </table:table-cell>
          <table:table-cell table:style-name="表格84.A3" office:value-type="string">
            <text:p text:style-name="P25" loext:marker-style-name="T129"><text:span text:style-name="T131">真正儲存答案的伺服器</text:span><text:span text:style-name="T130">，直接回傳正確的 </text:span><text:span text:style-name="T170">IP </text:span><text:span text:style-name="T130">位址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29"><text:span text:style-name="T170">6</text:span><text:span text:style-name="T129"/></text:p>
          </table:table-cell>
          <table:table-cell table:style-name="表格84.A4" office:value-type="string">
            <text:p text:style-name="P25" loext:marker-style-name="T129"><text:span text:style-name="T130">回傳 </text:span><text:span text:style-name="T170">IP </text:span><text:span text:style-name="T130">位址 ✓</text:span></text:p>
          </table:table-cell>
          <table:table-cell table:style-name="表格84.A4" office:value-type="string">
            <text:p text:style-name="P25" loext:marker-style-name="T129"><text:span text:style-name="T130">瀏覽器取得 </text:span><text:span text:style-name="T170">IP </text:span><text:span text:style-name="T130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8"><text:span text:style-name="T176">📌 <text:s/></text:span><text:span text:style-name="T226">一句話總結</text:span></text:p>
            <text:p text:style-name="P9" loext:marker-style-name="T101"><text:span text:style-name="T148">DNS </text:span><text:span text:style-name="T99">解析為「由快取開始，經 </text:span><text:span text:style-name="T148">Local DNS</text:span><text:span text:style-name="T99">，逐層向 </text:span><text:span text:style-name="T148">Root</text:span><text:span text:style-name="T99">、</text:span><text:span text:style-name="T148">TLD</text:span><text:span text:style-name="T99">、</text:span><text:span text:style-name="T148">Authoritative DNS </text:span><text:span text:style-name="T99">查詢，最後取得 </text:span><text:span text:style-name="T148">IP </text:span><text:span text:style-name="T99">位址」。</text:span></text:p>
          </table:table-cell>
          <table:covered-table-cell/>
          <table:covered-table-cell/>
        </table:table-row>
      </table:table>
      <text:h text:style-name="P2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8"><text:span text:style-name="T176">⚠️ <text:s/></text:span><text:span text:style-name="T198">最關鍵的差別</text:span></text:p>
            <text:p text:style-name="P9" loext:marker-style-name="T101"><text:span text:style-name="T117">兩種方式的路徑相同</text:span><text:span text:style-name="T99">（</text:span><text:span text:style-name="T148">Cache → Local → Root → TLD → Auth</text:span><text:span text:style-name="T99">），</text:span><text:span text:style-name="T313">唯一差別只有一件事：「誰去問」</text:span><text:span text:style-name="T99">。</text:span></text:p>
            <text:p text:style-name="P10" loext:marker-style-name="T101"><text:span text:style-name="T148">→ </text:span><text:span text:style-name="T289">DNS </text:span><text:span text:style-name="T272">幫你問完 ＝ </text:span><text:span text:style-name="T289">Recursive</text:span><text:span text:style-name="T272">（遞迴）</text:span><text:span text:style-name="T99">；</text:span><text:span text:style-name="T381">你自己去問 ＝ </text:span><text:span text:style-name="T393">Iterative</text:span><text:span text:style-name="T381">（反覆）</text:span><text:span text:style-name="T99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6" loext:marker-style-name="T65"><text:span text:style-name="T64">比較項目</text:span><text:span text:style-name="T65"/></text:p>
          </table:table-cell>
          <table:table-cell table:style-name="表格85.A2" office:value-type="string">
            <text:p text:style-name="P6" loext:marker-style-name="T65"><text:span text:style-name="T74">Recursive</text:span><text:span text:style-name="T64">（遞迴）</text:span></text:p>
          </table:table-cell>
          <table:table-cell table:style-name="表格85.A2" office:value-type="string">
            <text:p text:style-name="P6" loext:marker-style-name="T65"><text:span text:style-name="T74">Iterative</text:span><text:span text:style-name="T64">（反覆）</text:span></text:p>
          </table:table-cell>
        </table:table-row>
        <table:table-row table:style-name="表格85.1">
          <table:table-cell table:style-name="表格85.A3" office:value-type="string">
            <text:p text:style-name="P25" loext:marker-style-name="T78"><text:span text:style-name="T77">誰去問</text:span><text:span text:style-name="T78"/></text:p>
          </table:table-cell>
          <table:table-cell table:style-name="表格85.A3" office:value-type="string">
            <text:p text:style-name="P25" loext:marker-style-name="T91"><text:span text:style-name="T142">DNS </text:span><text:span text:style-name="T90">伺服器代替你問完</text:span></text:p>
          </table:table-cell>
          <table:table-cell table:style-name="表格85.A3" office:value-type="string">
            <text:p text:style-name="P25" loext:marker-style-name="T87"><text:span text:style-name="T86">你自己逐層查詢</text:span><text:span text:style-name="T87"/></text:p>
          </table:table-cell>
        </table:table-row>
        <table:table-row table:style-name="表格85.1">
          <table:table-cell table:style-name="表格85.A4" office:value-type="string">
            <text:p text:style-name="P25" loext:marker-style-name="T78"><text:span text:style-name="T77">問幾次</text:span><text:span text:style-name="T78"/></text:p>
          </table:table-cell>
          <table:table-cell table:style-name="表格85.A4" office:value-type="string">
            <text:p text:style-name="P25" loext:marker-style-name="T91"><text:span text:style-name="T90">你只問 </text:span><text:span text:style-name="T142">1 </text:span><text:span text:style-name="T90">次</text:span></text:p>
          </table:table-cell>
          <table:table-cell table:style-name="表格85.A4" office:value-type="string">
            <text:p text:style-name="P25" loext:marker-style-name="T87"><text:span text:style-name="T86">每層各問一次，共多次</text:span><text:span text:style-name="T87"/></text:p>
          </table:table-cell>
        </table:table-row>
        <table:table-row table:style-name="表格85.1">
          <table:table-cell table:style-name="表格85.A3" office:value-type="string">
            <text:p text:style-name="P25" loext:marker-style-name="T78"><text:span text:style-name="T77">常見場合</text:span><text:span text:style-name="T78"/></text:p>
          </table:table-cell>
          <table:table-cell table:style-name="表格85.A3" office:value-type="string">
            <text:p text:style-name="P25" loext:marker-style-name="T78"><text:span text:style-name="T77">一般使用者 → </text:span><text:span text:style-name="T138">Local DNS</text:span></text:p>
          </table:table-cell>
          <table:table-cell table:style-name="表格85.A3" office:value-type="string">
            <text:p text:style-name="P25" loext:marker-style-name="T78"><text:span text:style-name="T138">DNS </text:span><text:span text:style-name="T77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5" loext:marker-style-name="T78"><text:span text:style-name="T77">記憶口訣</text:span><text:span text:style-name="T78"/></text:p>
          </table:table-cell>
          <table:table-cell table:style-name="表格85.A4" office:value-type="string">
            <text:p text:style-name="P25" loext:marker-style-name="T187"><text:span text:style-name="T186">代查到底</text:span><text:span text:style-name="T187"/></text:p>
          </table:table-cell>
          <table:table-cell table:style-name="表格85.A4" office:value-type="string">
            <text:p text:style-name="P25" loext:marker-style-name="T34"><text:span text:style-name="T33">逐層詢問</text:span><text:span text:style-name="T34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8"><text:span text:style-name="T176">🗣️ <text:s/></text:span><text:span text:style-name="T47">問路比喻</text:span></text:p>
            <text:p text:style-name="P9"><text:span text:style-name="T61">Recursive</text:span><text:span text:style-name="T53">（朋友幫你問完）</text:span><text:span text:style-name="T51">：</text:span><text:span text:style-name="T115">你只問朋友（</text:span><text:span text:style-name="T158">Local DNS</text:span><text:span text:style-name="T115">）一次</text:span><text:span text:style-name="T99">「台北</text:span><text:span text:style-name="T148">101</text:span><text:span text:style-name="T99">在哪？」朋友自己跑完 </text:span><text:span text:style-name="T148">Root→TLD→Auth</text:span><text:span text:style-name="T99">，回你 </text:span><text:span text:style-name="T148">IP</text:span><text:span text:style-name="T99">，你沒動過。</text:span></text:p>
            <text:p text:style-name="P10"><text:span text:style-name="T61">Iterative</text:span><text:span text:style-name="T53">（你自己跑全程）</text:span><text:span text:style-name="T51">：</text:span><text:span text:style-name="T99">你問 </text:span><text:span text:style-name="T148">Root</text:span><text:span text:style-name="T99">「我不知道，去問 </text:span><text:span text:style-name="T148">TLD</text:span><text:span text:style-name="T99">」→ 你問 </text:span><text:span text:style-name="T148">TLD</text:span><text:span text:style-name="T99">「去問 </text:span><text:span text:style-name="T148">Auth</text:span><text:span text:style-name="T99">」→ 你問 </text:span><text:span text:style-name="T148">Auth </text:span><text:span text:style-name="T99">拿到 </text:span><text:span text:style-name="T148">IP</text:span><text:span text:style-name="T99">，全程你自己跑。</text:span></text:p>
            <text:p text:style-name="P10"><text:span text:style-name="T24">為什麼有兩種？</text:span><text:span text:style-name="T273">一般使用者採 </text:span><text:span text:style-name="T290">Recursive</text:span><text:span text:style-name="T273">（簡單方便）</text:span><text:span text:style-name="T99">；</text:span><text:span text:style-name="T394">DNS </text:span><text:span text:style-name="T382">伺服器之間採 </text:span><text:span text:style-name="T394">Iterative</text:span><text:span text:style-name="T99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四、</text:span><text:span text:style-name="T27">Open Resolver </text:span><text:span text:style-name="T28">風險</text:span></text:h>
      <text:p text:style-name="P32" loext:marker-style-name="T101"><text:span text:style-name="T160">Open Resolver </text:span><text:span text:style-name="T99">是</text:span><text:span text:style-name="T555">對外完全開放、任何人都可以使用的 </text:span><text:span text:style-name="T559">DNS </text:span><text:span text:style-name="T555">伺服器</text:span><text:span text:style-name="T99">；因為</text:span><text:span text:style-name="T115">沒有存取限制，容易成為攻擊目標</text:span><text:span text:style-name="T99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2" loext:marker-style-name="T65"><text:span text:style-name="T74">⚠️ Cache Poisoning</text:span><text:span text:style-name="T64">（快取污染）</text:span></text:p>
            </table:table-cell>
            <table:table-cell table:style-name="表格86.A1" office:value-type="string">
              <text:p text:style-name="P22" loext:marker-style-name="T65"><text:span text:style-name="T74">⚡ DDoS </text:span><text:span text:style-name="T64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 loext:marker-style-name="T78"><text:span text:style-name="T444">攻擊者偽造 </text:span><text:span text:style-name="T461">DNS </text:span><text:span text:style-name="T444">回應</text:span><text:span text:style-name="T77">，</text:span><text:span text:style-name="T308">將惡意 </text:span><text:span text:style-name="T302">IP </text:span><text:span text:style-name="T308">植入 </text:span><text:span text:style-name="T302">DNS </text:span><text:span text:style-name="T308">快取，使用者被引導至釣魚網站</text:span><text:span text:style-name="T77">。流程：偽造回應 → </text:span><text:span text:style-name="T138">DNS </text:span><text:span text:style-name="T77">存假 </text:span><text:span text:style-name="T138">IP → </text:span><text:span text:style-name="T77">用戶連到釣魚網站。</text:span></text:p>
          </table:table-cell>
          <table:table-cell table:style-name="表格86.A2" office:value-type="string">
            <text:p text:style-name="P25" loext:marker-style-name="T78"><text:span text:style-name="T499">攻擊者偽造受害者 </text:span><text:span text:style-name="T516">IP </text:span><text:span text:style-name="T330">發送查詢</text:span><text:span text:style-name="T77">，</text:span><text:span text:style-name="T302">DNS </text:span><text:span text:style-name="T308">回傳大量資料給受害者，形成流量放大效果</text:span><text:span text:style-name="T77">。流程：小封包 → </text:span><text:span text:style-name="T138">DNS </text:span><text:span text:style-name="T77">回超大資料 → 灌爆受害者。</text:span></text:p>
          </table:table-cell>
        </table:table-row>
      </table:table>
      <text:h text:style-name="P2" text:outline-level="2" loext:marker-style-name="T27"><text:span text:style-name="T28">五、</text:span><text:span text:style-name="T27">DNSSEC — DNS </text:span><text:span text:style-name="T28">安全機制</text:span></text:h>
      <text:p text:style-name="P32" loext:marker-style-name="T101"><text:span text:style-name="T148">DNSSEC</text:span><text:span text:style-name="T99">（</text:span><text:span text:style-name="T148">DNS Security Extensions</text:span><text:span text:style-name="T99">）透過</text:span><text:span text:style-name="T452">數位簽章機制</text:span><text:span text:style-name="T99">，</text:span><text:span text:style-name="T407">讓接收方能驗證 </text:span><text:span text:style-name="T415">DNS </text:span><text:span text:style-name="T407">回應的真實性與完整性</text:span><text:span text:style-name="T99">，</text:span><text:span text:style-name="T117">防止資料被偽造或篡改</text:span><text:span text:style-name="T99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2" loext:marker-style-name="T65"><text:span text:style-name="T74">✅ DNSSEC </text:span><text:span text:style-name="T64">可以防禦</text:span></text:p>
            </table:table-cell>
            <table:table-cell table:style-name="表格87.A1" office:value-type="string">
              <text:p text:style-name="P22" loext:marker-style-name="T65"><text:span text:style-name="T74">❌ DNSSEC </text:span><text:span text:style-name="T64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5" loext:marker-style-name="T78"><text:span text:style-name="T77">防止 </text:span><text:span text:style-name="T138">DNS Spoofing</text:span><text:span text:style-name="T77">（假回應）／防止 </text:span><text:span text:style-name="T138">Cache Poisoning</text:span><text:span text:style-name="T77">（快取污染）／</text:span><text:span text:style-name="T445">驗證資料完整性與來源真實性</text:span></text:p>
          </table:table-cell>
          <table:table-cell table:style-name="表格87.A2" office:value-type="string">
            <text:p text:style-name="P25" loext:marker-style-name="T78"><text:span text:style-name="T77">不提供加密功能（非 </text:span><text:span text:style-name="T138">HTTPS</text:span><text:span text:style-name="T77">）／</text:span><text:span text:style-name="T258">無法防禦 </text:span><text:span text:style-name="T247">DoS / DDoS </text:span><text:span text:style-name="T258">攻擊</text:span><text:span text:style-name="T77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8"><text:span text:style-name="T176">⚠️ <text:s/></text:span><text:span text:style-name="T226">最重要的一句話</text:span></text:p>
            <text:p text:style-name="P9" loext:marker-style-name="T230"><text:span text:style-name="T234">DNSSEC</text:span><text:span text:style-name="T233"> = </text:span><text:span text:style-name="T231">驗證真偽，不是加密，不防 </text:span><text:span text:style-name="T235">DDoS</text:span></text:p>
          </table:table-cell>
          <table:covered-table-cell/>
        </table:table-row>
      </table:table>
      <text:h text:style-name="P2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8"><text:span text:style-name="T176">🔍 <text:s/></text:span><text:span text:style-name="T47">診斷結論</text:span></text:p>
            <text:p text:style-name="P9" loext:marker-style-name="T101"><text:span text:style-name="T99">能用 </text:span><text:span text:style-name="T148">IP </text:span><text:span text:style-name="T99">連線（</text:span><text:span text:style-name="T148">ping 142.250.1.1 </text:span><text:span text:style-name="T99">成功），但無法用網域名稱連線（</text:span><text:span text:style-name="T148">ping google.com </text:span><text:span text:style-name="T99">失敗）→ </text:span><text:span text:style-name="T148">DNS </text:span><text:span text:style-name="T99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8"><text:span text:style-name="T176">📝 <text:s/></text:span><text:span text:style-name="T217">申論題標準答案</text:span></text:p>
            <text:p text:style-name="P9"><text:span text:style-name="T218">一、</text:span><text:span text:style-name="T221">DNS </text:span><text:span text:style-name="T218">功能：</text:span><text:span text:style-name="T148">DNS </text:span><text:span text:style-name="T99">為網際網路中負責</text:span><text:span text:style-name="T271">將網域名稱轉換為 </text:span><text:span text:style-name="T288">IP </text:span><text:span text:style-name="T271">位址</text:span><text:span text:style-name="T99">的分散式系統。</text:span></text:p>
            <text:p text:style-name="P10"><text:span text:style-name="T218">二、查詢流程：</text:span><text:span text:style-name="T99">由</text:span><text:span text:style-name="T117">快取</text:span><text:span text:style-name="T99">開始，依序向 </text:span><text:span text:style-name="T160">Local DNS</text:span><text:span text:style-name="T99">、</text:span><text:span text:style-name="T160">Root DNS</text:span><text:span text:style-name="T99">、</text:span><text:span text:style-name="T160">TLD DNS</text:span><text:span text:style-name="T99">、</text:span><text:span text:style-name="T160">Authoritative DN</text:span><text:span text:style-name="T148">S </text:span><text:span text:style-name="T99">查詢，最終取得 </text:span><text:span text:style-name="T148">IP </text:span><text:span text:style-name="T99">位址。</text:span></text:p>
            <text:p text:style-name="P10"><text:span text:style-name="T218">三、</text:span><text:span text:style-name="T221">Recursive</text:span><text:span text:style-name="T218">：</text:span><text:span text:style-name="T99">由 </text:span><text:span text:style-name="T148">DNS </text:span><text:span text:style-name="T99">伺服器代替用戶端完整查詢並直接回傳最終 </text:span><text:span text:style-name="T148">IP</text:span><text:span text:style-name="T99">，用戶端只需等待結果。</text:span></text:p>
            <text:p text:style-name="P10"><text:span text:style-name="T218">四、</text:span><text:span text:style-name="T221">Iterative</text:span><text:span text:style-name="T218">：</text:span><text:span text:style-name="T148">DNS </text:span><text:span text:style-name="T99">伺服器僅回應下一步查詢位置，由用戶端自行逐層向各 </text:span><text:span text:style-name="T148">DNS </text:span><text:span text:style-name="T99">查詢，直到取得 </text:span><text:span text:style-name="T148">IP</text:span><text:span text:style-name="T99">。</text:span></text:p>
            <text:p text:style-name="P10"><text:span text:style-name="T218">五、</text:span><text:span text:style-name="T221">DNSSEC</text:span><text:span text:style-name="T218">：</text:span><text:span text:style-name="T99">透過</text:span><text:span text:style-name="T117">數位簽章</text:span><text:span text:style-name="T583">驗證 </text:span><text:span text:style-name="T584">DNS </text:span><text:span text:style-name="T583">回應真實性</text:span><text:span text:style-name="T99">，可防 </text:span><text:span text:style-name="T148">DNS Spoofing </text:span><text:span text:style-name="T99">及 </text:span><text:span text:style-name="T148">Cache Poisoning</text:span><text:span text:style-name="T99">，但不提供加密，也</text:span><text:span text:style-name="T275">無法防禦 </text:span><text:span text:style-name="T292">DDoS</text:span><text:span text:style-name="T99">。</text:span></text:p>
          </table:table-cell>
        </table:table-row>
      </table:table>
      <text:h text:style-name="P13" text:outline-level="1" loext:marker-style-name="T67"><text:span text:style-name="T66">第 七 篇　路由協定：</text:span><text:span text:style-name="T67">OSPF </text:span><text:span text:style-name="T66">與 </text:span><text:span text:style-name="T67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8"><text:span text:style-name="T176">🗺️ <text:s/></text:span><text:span text:style-name="T47">在解決什麼問題？</text:span></text:p>
            <text:p text:style-name="P9" loext:marker-style-name="T101"><text:span text:style-name="T99">網路上有無數個</text:span><text:span text:style-name="T117">路由器（</text:span><text:span text:style-name="T160">Router</text:span><text:span text:style-name="T117">）</text:span><text:span text:style-name="T99">，它們只有一個任務：「</text:span><text:span text:style-name="T266">資料要走哪條路才能抵達目的地？</text:span><text:span text:style-name="T99">」</text:span><text:span text:style-name="T313">它們需要一套共通的對話規則，這就是路由協定</text:span><text:span text:style-name="T99">。</text:span></text:p>
          </table:table-cell>
        </table:table-row>
      </table:table>
      <text:h text:style-name="P2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2" loext:marker-style-name="T65"><text:span text:style-name="T74">🏢 IGP — </text:span><text:span text:style-name="T64">內部用</text:span></text:p>
            </table:table-cell>
            <table:table-cell table:style-name="表格90.A1" office:value-type="string">
              <text:p text:style-name="P22" loext:marker-style-name="T65"><text:span text:style-name="T74">🌍 EGP — </text:span><text:span text:style-name="T64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5" loext:marker-style-name="T78"><text:span text:style-name="T142">Interior Gateway Protocol</text:span><text:span text:style-name="T77">，在</text:span><text:span text:style-name="T362">同一個組織內部使用</text:span><text:span text:style-name="T77">（公司內網、校園網路）。常見：</text:span><text:span text:style-name="T138">OSPF</text:span><text:span text:style-name="T77">（最主流）、</text:span><text:span text:style-name="T138">RIP</text:span><text:span text:style-name="T77">（較舊）。</text:span></text:p>
          </table:table-cell>
          <table:table-cell table:style-name="表格90.A2" office:value-type="string">
            <text:p text:style-name="P25" loext:marker-style-name="T78"><text:span text:style-name="T142">Exterior Gateway Protocol</text:span><text:span text:style-name="T77">，</text:span><text:span text:style-name="T258">在不同組織之間使用</text:span><text:span text:style-name="T77">（中華電信 ↔ </text:span><text:span text:style-name="T138">Google</text:span><text:span text:style-name="T77">、</text:span><text:span text:style-name="T138">ISP ↔ ISP</text:span><text:span text:style-name="T77">）。目前唯一在用：</text:span><text:span text:style-name="T138">BGP</text:span><text:span text:style-name="T77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8"><text:span text:style-name="T176">⚡ <text:s/></text:span><text:span text:style-name="T180">一句話記憶法</text:span></text:p>
            <text:p text:style-name="P9" loext:marker-style-name="T101"><text:span text:style-name="T493">公司／校園內 → 用 </text:span><text:span text:style-name="T511">IGP</text:span><text:span text:style-name="T99">（</text:span><text:span text:style-name="T283">OSPF</text:span><text:span text:style-name="T148"> </text:span><text:span text:style-name="T99">或 </text:span><text:span text:style-name="T148">RIP</text:span><text:span text:style-name="T99">）；</text:span><text:span text:style-name="T494">公司與公司間 → 用 </text:span><text:span text:style-name="T512">EGP</text:span><text:span text:style-name="T99">（</text:span><text:span text:style-name="T283">BGP</text:span><text:span text:style-name="T99">）。</text:span></text:p>
          </table:table-cell>
          <table:covered-table-cell/>
        </table:table-row>
      </table:table>
      <text:h text:style-name="P2" text:outline-level="2" loext:marker-style-name="T27"><text:span text:style-name="T28">二、</text:span><text:span text:style-name="T27">OSPF </text:span><text:span text:style-name="T28">的核心概念</text:span></text:h>
      <text:p text:style-name="P32" loext:marker-style-name="T101"><text:span text:style-name="T283">OSPF</text:span><text:span text:style-name="T266">（</text:span><text:span text:style-name="T283">Open Shortest Path First</text:span><text:span text:style-name="T266">）</text:span><text:span text:style-name="T99">是 </text:span><text:span text:style-name="T160">IGP </text:span><text:span text:style-name="T117">裡最主流的協定</text:span><text:span text:style-name="T99">，最大特色是</text:span><text:span text:style-name="T453">把網路切成多個區域（</text:span><text:span text:style-name="T468">Area</text:span><text:span text:style-name="T453">）管理</text:span><text:span text:style-name="T99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8"><text:span text:style-name="T176">📌 <text:s/></text:span><text:span text:style-name="T226">最重要的規定</text:span></text:p>
            <text:p text:style-name="P9" loext:marker-style-name="T101"><text:span text:style-name="T382">所有 </text:span><text:span text:style-name="T394">Area </text:span><text:span text:style-name="T382">都必須連到 </text:span><text:span text:style-name="T394">Area 0</text:span><text:span text:style-name="T382">（骨幹區域）</text:span><text:span text:style-name="T99">。</text:span><text:span text:style-name="T513">Area 0 </text:span><text:span text:style-name="T495">就像高速公路主幹道，其他 </text:span><text:span text:style-name="T513">Area </text:span><text:span text:style-name="T495">是交流道</text:span><text:span text:style-name="T99">。</text:span></text:p>
          </table:table-cell>
        </table:table-row>
      </table:table>
      <text:h text:style-name="P2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32" loext:marker-style-name="T101"><text:span text:style-name="T99">把整個 </text:span><text:span text:style-name="T148">OSPF </text:span><text:span text:style-name="T99">網路想像成一座城市：</text:span><text:span text:style-name="T117">城市裡有很多「區（</text:span><text:span text:style-name="T160">Area</text:span><text:span text:style-name="T117">）」像大樓</text:span><text:span text:style-name="T99">；</text:span><text:span text:style-name="T585">中間一定有「主幹道」就是 </text:span><text:span text:style-name="T586">Area 0</text:span><text:span text:style-name="T585">；所有大樓要互通都必須先連到 </text:span><text:span text:style-name="T586">Area 0</text:span><text:span text:style-name="T99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6" loext:marker-style-name="T71"><text:span text:style-name="T70">類型</text:span><text:span text:style-name="T71"/></text:p>
            </table:table-cell>
            <table:table-cell table:style-name="表格92.A1" office:value-type="string">
              <text:p text:style-name="P6" loext:marker-style-name="T71"><text:span text:style-name="T70">本質</text:span><text:span text:style-name="T71"/></text:p>
            </table:table-cell>
            <table:table-cell table:style-name="表格92.A1" office:value-type="string">
              <text:p text:style-name="P6" loext:marker-style-name="T71"><text:span text:style-name="T70">核心記憶點</text:span><text:span text:style-name="T71"/></text:p>
            </table:table-cell>
            <table:table-cell table:style-name="表格92.A1" office:value-type="string">
              <text:p text:style-name="P6" loext:marker-style-name="T71"><text:span text:style-name="T70">比喻</text:span><text:span text:style-name="T71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 loext:marker-style-name="T129"><text:span text:style-name="T170">① Internal</text:span><text:span text:style-name="T129"/></text:p>
          </table:table-cell>
          <table:table-cell table:style-name="表格92.A2" office:value-type="string">
            <text:p text:style-name="P25" loext:marker-style-name="T129"><text:span text:style-name="T130">不出 </text:span><text:span text:style-name="T170">Area</text:span></text:p>
          </table:table-cell>
          <table:table-cell table:style-name="表格92.A2" office:value-type="string">
            <text:p text:style-name="P25" loext:marker-style-name="T129"><text:span text:style-name="T130">只在同一個 </text:span><text:span text:style-name="T170">Area </text:span><text:span text:style-name="T130">裡活動，對外一無所知</text:span></text:p>
          </table:table-cell>
          <table:table-cell table:style-name="表格92.A2" office:value-type="string">
            <text:p text:style-name="P25" loext:marker-style-name="T129"><text:span text:style-name="T130">只在一個辦公室活動的員工</text:span><text:span text:style-name="T129"/></text:p>
          </table:table-cell>
        </table:table-row>
        <table:table-row table:style-name="表格92.1">
          <table:table-cell table:style-name="表格92.A3" office:value-type="string">
            <text:p text:style-name="P25" loext:marker-style-name="T129"><text:span text:style-name="T170">② </text:span><text:span text:style-name="T587">Backbone</text:span></text:p>
          </table:table-cell>
          <table:table-cell table:style-name="表格92.A3" office:value-type="string">
            <text:p text:style-name="P25" loext:marker-style-name="T589"><text:span text:style-name="T588">在 </text:span><text:span text:style-name="T587">Area 0</text:span></text:p>
          </table:table-cell>
          <table:table-cell table:style-name="表格92.A3" office:value-type="string">
            <text:p text:style-name="P25" loext:marker-style-name="T129"><text:span text:style-name="T588">核心骨幹節點</text:span><text:span text:style-name="T130">，所有跨區流量都經過這裡</text:span></text:p>
          </table:table-cell>
          <table:table-cell table:style-name="表格92.A3" office:value-type="string">
            <text:p text:style-name="P25" loext:marker-style-name="T437"><text:span text:style-name="T436">高速公路主幹上的節點</text:span><text:span text:style-name="T437"/></text:p>
          </table:table-cell>
        </table:table-row>
        <table:table-row table:style-name="表格92.1">
          <table:table-cell table:style-name="表格92.A2" office:value-type="string">
            <text:p text:style-name="P25" loext:marker-style-name="T129"><text:span text:style-name="T170">③ </text:span><text:span text:style-name="T518">ABR</text:span></text:p>
          </table:table-cell>
          <table:table-cell table:style-name="表格92.A2" office:value-type="string">
            <text:p text:style-name="P25" loext:marker-style-name="T506"><text:span text:style-name="T505">跨 </text:span><text:span text:style-name="T518">Area </text:span><text:span text:style-name="T505">橋樑</text:span></text:p>
          </table:table-cell>
          <table:table-cell table:style-name="表格92.A2" office:value-type="string">
            <text:p text:style-name="P25" loext:marker-style-name="T506"><text:span text:style-name="T505">同時連 </text:span><text:span text:style-name="T518">Area 0 </text:span><text:span text:style-name="T505">與其他 </text:span><text:span text:style-name="T518">Area</text:span><text:span text:style-name="T505">，是區域間唯一合法的橋</text:span></text:p>
          </table:table-cell>
          <table:table-cell table:style-name="表格92.A2" office:value-type="string">
            <text:p text:style-name="P25" loext:marker-style-name="T312"><text:span text:style-name="T311">不同部門之間的聯絡窗口</text:span><text:span text:style-name="T312"/></text:p>
          </table:table-cell>
        </table:table-row>
        <table:table-row table:style-name="表格92.1">
          <table:table-cell table:style-name="表格92.A3" office:value-type="string">
            <text:p text:style-name="P25" loext:marker-style-name="T129"><text:span text:style-name="T170">④ </text:span><text:span text:style-name="T385">ASBR</text:span></text:p>
          </table:table-cell>
          <table:table-cell table:style-name="表格92.A3" office:value-type="string">
            <text:p text:style-name="P25" loext:marker-style-name="T129"><text:span text:style-name="T130">跨 </text:span><text:span text:style-name="T170">AS </text:span><text:span text:style-name="T130">入口</text:span></text:p>
          </table:table-cell>
          <table:table-cell table:style-name="表格92.A3" office:value-type="string">
            <text:p text:style-name="P25" loext:marker-style-name="T129"><text:span text:style-name="T130">把外部路由（</text:span><text:span text:style-name="T170">BGP/</text:span><text:span text:style-name="T130">靜態）引入 </text:span><text:span text:style-name="T170">OSPF</text:span><text:span text:style-name="T130">，</text:span><text:span text:style-name="T259">是對外入口</text:span></text:p>
          </table:table-cell>
          <table:table-cell table:style-name="表格92.A3" office:value-type="string">
            <text:p text:style-name="P25" loext:marker-style-name="T129"><text:span text:style-name="T130">公司對外的大門警衛室</text:span><text:span text:style-name="T129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8"><text:span text:style-name="T176">⚠️ <text:s/></text:span><text:span text:style-name="T198">考試最愛考的三個陷阱</text:span></text:p>
            <text:p text:style-name="P9"><text:span text:style-name="T214">✗ ABR </text:span><text:span text:style-name="T208">負責連接外部網路　→　</text:span><text:span text:style-name="T99">✓</text:span><text:span text:style-name="T115"> </text:span><text:span text:style-name="T158">ABR </text:span><text:span text:style-name="T115">只負責 </text:span><text:span text:style-name="T158">Area </text:span><text:span text:style-name="T115">之間的橋樑</text:span><text:span text:style-name="T99">，對外是 </text:span><text:span text:style-name="T148">ASBR </text:span><text:span text:style-name="T99">的工作。</text:span></text:p>
            <text:p text:style-name="P10"><text:span text:style-name="T214">✗ ASBR </text:span><text:span text:style-name="T208">是用來跨越不同 </text:span><text:span text:style-name="T214">Area</text:span><text:span text:style-name="T208">　→　</text:span><text:span text:style-name="T99">✓ </text:span><text:span text:style-name="T158">ASBR </text:span><text:span text:style-name="T115">是跨越不同 </text:span><text:span text:style-name="T158">AS</text:span><text:span text:style-name="T115">（整個系統）</text:span><text:span text:style-name="T99">，不是跨 </text:span><text:span text:style-name="T148">Area</text:span><text:span text:style-name="T99">。</text:span></text:p>
            <text:p text:style-name="P10"><text:span text:style-name="T214">✗ </text:span><text:span text:style-name="T208">任意兩個 </text:span><text:span text:style-name="T214">Area </text:span><text:span text:style-name="T208">可直接相連　→　</text:span><text:span text:style-name="T99">✓ </text:span><text:span text:style-name="T313">所有 </text:span><text:span text:style-name="T324">Area </text:span><text:span text:style-name="T313">一定要透過 </text:span><text:span text:style-name="T324">Area 0 </text:span><text:span text:style-name="T313">才能互通，不能繞過</text:span><text:span text:style-name="T99">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2" loext:marker-style-name="T65"><text:span text:style-name="T74">📦 Route</text:span><text:span text:style-name="T64">（路由）</text:span></text:p>
            </table:table-cell>
            <table:table-cell table:style-name="表格93.A1" office:value-type="string">
              <text:p text:style-name="P22" loext:marker-style-name="T65"><text:span text:style-name="T74">📜 AS-PATH</text:span><text:span text:style-name="T65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 loext:marker-style-name="T78"><text:span text:style-name="T77">回答「封包下一步要丟給誰？」。這是路由器最後做出</text:span><text:soft-page-break/><text:span text:style-name="T77">的轉送決定，對應到一個 </text:span><text:span text:style-name="T138">Next-Hop</text:span><text:span text:style-name="T77">（下一跳）。</text:span></text:p>
          </table:table-cell>
          <table:table-cell table:style-name="表格93.A2" office:value-type="string">
            <text:p text:style-name="P25" loext:marker-style-name="T78"><text:span text:style-name="T77">回答「這條路由消息一路經過了哪些 </text:span><text:span text:style-name="T138">AS</text:span><text:span text:style-name="T77">（自治系統）？」。它是一串 </text:span><text:span text:style-name="T138">AS </text:span><text:span text:style-name="T77">編號名單，也是 </text:span><text:span text:style-name="T242">BGP</text:span><text:span text:style-name="T138"> </text:span><text:span text:style-name="T77">用來判</text:span><text:soft-page-break/><text:span text:style-name="T77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5" loext:marker-style-name="T78"><text:span text:style-name="T77">是</text:span><text:span text:style-name="T363">「實際的轉送動作」——封包真的會照它走</text:span><text:span text:style-name="T77">。</text:span></text:p>
          </table:table-cell>
          <table:table-cell table:style-name="表格93.A2" office:value-type="string">
            <text:p text:style-name="P25" loext:marker-style-name="T78"><text:span text:style-name="T77">是</text:span><text:span text:style-name="T500">「這條路的來歷（履歷）」——封包根本看不到它</text:span><text:span text:style-name="T77">，</text:span><text:span text:style-name="T305">它只給 </text:span><text:span text:style-name="T300">BGP </text:span><text:span text:style-name="T305">參考</text:span><text:span text:style-name="T77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8"><text:span text:style-name="T176">🔎 <text:s/></text:span><text:span text:style-name="T47">看一個例子：兩條路由二選一</text:span></text:p>
            <text:p text:style-name="P9" loext:marker-style-name="T101"><text:span text:style-name="T159">Google </text:span><text:span text:style-name="T116">同時收到兩條到 </text:span><text:span text:style-name="T159">1.1.1.0/24 </text:span><text:span text:style-name="T116">的路由廣告</text:span><text:span text:style-name="T99">：</text:span><text:span text:style-name="T161">ISP A </text:span><text:span text:style-name="T118">的 </text:span><text:span text:style-name="T161">AS-PATH </text:span><text:span text:style-name="T118">是「</text:span><text:span text:style-name="T161">100 200 300</text:span><text:span text:style-name="T118">」（經過 </text:span><text:span text:style-name="T161">3 </text:span><text:span text:style-name="T118">個 </text:span><text:span text:style-name="T161">AS</text:span><text:span text:style-name="T118">）</text:span><text:span text:style-name="T99">，</text:span><text:span text:style-name="T161">ISP B </text:span><text:span text:style-name="T118">的 </text:span><text:span text:style-name="T161">AS-PATH </text:span><text:span text:style-name="T118">是「</text:span><text:span text:style-name="T161">400 300</text:span><text:span text:style-name="T118">」（只經過 </text:span><text:span text:style-name="T161">2 </text:span><text:span text:style-name="T118">個 </text:span><text:span text:style-name="T161">AS</text:span><text:span text:style-name="T118">）</text:span><text:span text:style-name="T99">。</text:span></text:p>
            <text:p text:style-name="P10"><text:span text:style-name="T114">在其他條件都相同時 →</text:span><text:span text:style-name="T267"> </text:span><text:span text:style-name="T284">BGP </text:span><text:span text:style-name="T267">會偏好較短的「</text:span><text:span text:style-name="T284">400 300</text:span><text:span text:style-name="T267">」</text:span><text:span text:style-name="T99">。</text:span></text:p>
            <text:p text:style-name="P10" loext:marker-style-name="T101"><text:span text:style-name="T99">小提醒：</text:span><text:span text:style-name="T325">AS-PATH </text:span><text:span text:style-name="T314">要從右邊讀起，最右邊的「</text:span><text:span text:style-name="T325">300</text:span><text:span text:style-name="T314">」才是這條路由的發源地（</text:span><text:span text:style-name="T325">Origin AS</text:span><text:span text:style-name="T314">）</text:span><text:span text:style-name="T99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31"><text:span text:style-name="T175">❁</text:span><text:span text:style-name="T99">假設你收到兩條路由：<text:line-break/>Route A: AS-PATH = 100 200 300<text:line-break/>Route B: AS-PATH = 400 300<text:line-break/><text:line-break/>你先不要管 Route 是什麼。<text:line-break/><text:line-break/>只看 AS-PATH：100 200 300 <text:s/>意思：我 ← AS100 ← AS200 ← AS300<text:line-break/><text:line-break/>而400 300 <text:s/>意思：我 ← AS400 ← AS300<text:line-break/><text:line-break/></text:span><text:span text:style-name="T566">AS-PATH 就只是：這個路由消息經過了哪些 AS 的名單。就這樣而已。</text:span><text:span text:style-name="T99"><text:line-break/><text:line-break/>然後 </text:span><text:span text:style-name="T267">BGP</text:span><text:span text:style-name="T99"> 看到：<text:line-break/><text:line-break/>100 200 300 <text:s/>有 3 個 AS。<text:line-break/><text:line-break/>400 300 <text:s/>有 2 個 AS。<text:line-break/><text:line-break/>於是它想：</text:span><text:span text:style-name="T523">「嗯，看起來第二條比較短。」然後選第二條</text:span><text:span text:style-name="T99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8"><text:span text:style-name="T176">⚠️ <text:s/></text:span><text:span text:style-name="T47">新手最容易搞混的地方</text:span></text:p>
            <text:p text:style-name="P9" loext:marker-style-name="T101"><text:span text:style-name="T148">AS-PATH </text:span><text:span text:style-name="T99">不是寫在封包上的東西，也不是「下一跳」。封包只認 </text:span><text:span text:style-name="T148">Next-Hop</text:span><text:span text:style-name="T99">；</text:span><text:span text:style-name="T291">AS-PATH </text:span><text:span text:style-name="T274">純粹是 </text:span><text:span text:style-name="T291">BGP </text:span><text:span text:style-name="T274">拿來「比較哪條路由比較好」的參考資料</text:span><text:span text:style-name="T99">。</text:span></text:p>
            <text:p text:style-name="P8"><text:span text:style-name="T176">🎯 <text:s/></text:span><text:span text:style-name="T47">考點加碼：</text:span><text:span text:style-name="T58">AS-PATH </text:span><text:span text:style-name="T47">的另一個任務</text:span></text:p>
            <text:p text:style-name="P10" loext:marker-style-name="T101"><text:span text:style-name="T99">防迴圈！</text:span><text:span text:style-name="T116">當某個 </text:span><text:span text:style-name="T159">AS </text:span><text:span text:style-name="T116">發現一條路由的 </text:span><text:span text:style-name="T159">AS-PATH </text:span><text:span text:style-name="T116">裡「已經有自己的 </text:span><text:span text:style-name="T159">AS </text:span><text:span text:style-name="T116">編號」</text:span><text:span text:style-name="T99">，</text:span><text:span text:style-name="T314">就會直接丟棄這條路由，避免封包在 </text:span><text:span text:style-name="T325">AS </text:span><text:span text:style-name="T314">之間繞圈圈</text:span><text:span text:style-name="T99">。</text:span></text:p>
          </table:table-cell>
          <table:covered-table-cell/>
        </table:table-row>
      </table:table>
      <text:h text:style-name="P2" text:outline-level="2" loext:marker-style-name="T27"><text:span text:style-name="T28">五、</text:span><text:span text:style-name="T27">BGP </text:span><text:span text:style-name="T28">怎麼選最佳路徑？（九步選路）</text:span></text:h>
      <text:p text:style-name="P32" loext:marker-style-name="T101"><text:span text:style-name="T148">BGP </text:span><text:span text:style-name="T99">不會自己計算最短距離（那是 </text:span><text:span text:style-name="T148">OSPF </text:span><text:span text:style-name="T99">做的事），它是在「比條件」，政策優先。依序比較，前面贏就停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2" loext:marker-style-name="T71"><text:span text:style-name="T70">步驟</text:span><text:span text:style-name="T71"/></text:p>
            </table:table-cell>
            <table:table-cell table:style-name="表格94.A1" office:value-type="string">
              <text:p text:style-name="P22" loext:marker-style-name="T71"><text:span text:style-name="T70">屬性</text:span><text:span text:style-name="T71"/></text:p>
            </table:table-cell>
            <table:table-cell table:style-name="表格94.A1" office:value-type="string">
              <text:p text:style-name="P22" loext:marker-style-name="T71"><text:span text:style-name="T70">說明</text:span><text:span text:style-name="T71"/></text:p>
            </table:table-cell>
            <table:table-cell table:style-name="表格94.A1" office:value-type="string">
              <text:p text:style-name="P22" loext:marker-style-name="T71"><text:span text:style-name="T70">備註</text:span><text:span text:style-name="T71"/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4" loext:marker-style-name="T78"><text:span text:style-name="T138">①</text:span><text:span text:style-name="T78"/></text:p>
          </table:table-cell>
          <table:table-cell table:style-name="表格94.A2" office:value-type="string">
            <text:p text:style-name="P25" loext:marker-style-name="T129"><text:span text:style-name="T170">Weight</text:span><text:span text:style-name="T129"/></text:p>
          </table:table-cell>
          <table:table-cell table:style-name="表格94.A2" office:value-type="string">
            <text:p text:style-name="P25" loext:marker-style-name="T129"><text:span text:style-name="T130">數值越高越優先</text:span><text:span text:style-name="T129"/></text:p>
          </table:table-cell>
          <table:table-cell table:style-name="表格94.A2" office:value-type="string">
            <text:p text:style-name="P25" loext:marker-style-name="T129"><text:span text:style-name="T170">⚠️ Cisco </text:span><text:span text:style-name="T130">私有，他牌無此屬性</text:span></text:p>
          </table:table-cell>
        </table:table-row>
        <table:table-row table:style-name="表格94.1">
          <table:table-cell table:style-name="表格94.A3" office:value-type="string">
            <text:p text:style-name="P24" loext:marker-style-name="T78"><text:span text:style-name="T138">②</text:span><text:span text:style-name="T78"/></text:p>
          </table:table-cell>
          <table:table-cell table:style-name="表格94.A3" office:value-type="string">
            <text:p text:style-name="P25" loext:marker-style-name="T31"><text:span text:style-name="T39">Local Preference</text:span><text:span text:style-name="T31"/></text:p>
          </table:table-cell>
          <table:table-cell table:style-name="表格94.A3" office:value-type="string">
            <text:p text:style-name="P25" loext:marker-style-name="T129"><text:span text:style-name="T130">數值越高越優先</text:span><text:span text:style-name="T129"/></text:p>
          </table:table-cell>
          <table:table-cell table:style-name="表格94.A3" office:value-type="string">
            <text:p text:style-name="P25" loext:marker-style-name="T31"><text:span text:style-name="T39">✅ </text:span><text:span text:style-name="T32">最重要的通用屬性（考試重點）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78"><text:span text:style-name="T138">③</text:span><text:span text:style-name="T78"/></text:p>
          </table:table-cell>
          <table:table-cell table:style-name="表格94.A2" office:value-type="string">
            <text:p text:style-name="P25" loext:marker-style-name="T129"><text:span text:style-name="T130">本地產生</text:span><text:span text:style-name="T129"/></text:p>
          </table:table-cell>
          <table:table-cell table:style-name="表格94.A2" office:value-type="string">
            <text:p text:style-name="P25" loext:marker-style-name="T129"><text:span text:style-name="T170">network / aggregate </text:span><text:span text:style-name="T130">產生的路由優先</text:span></text:p>
          </table:table-cell>
          <table:table-cell table:style-name="表格94.A2" office:value-type="string">
            <text:p text:style-name="P25" loext:marker-style-name="T129"><text:span text:style-name="T130">自己產生的路最可靠</text:span><text:span text:style-name="T129"/></text:p>
          </table:table-cell>
        </table:table-row>
        <table:table-row table:style-name="表格94.1">
          <table:table-cell table:style-name="表格94.A3" office:value-type="string">
            <text:p text:style-name="P24" loext:marker-style-name="T78"><text:span text:style-name="T138">④</text:span><text:span text:style-name="T78"/></text:p>
          </table:table-cell>
          <table:table-cell table:style-name="表格94.A3" office:value-type="string">
            <text:p text:style-name="P25" loext:marker-style-name="T129"><text:span text:style-name="T170">AS-PATH</text:span><text:span text:style-name="T129"/></text:p>
          </table:table-cell>
          <table:table-cell table:style-name="表格94.A3" office:value-type="string">
            <text:p text:style-name="P25" loext:marker-style-name="T129"><text:span text:style-name="T130">路徑越短（經過 </text:span><text:span text:style-name="T170">AS </text:span><text:span text:style-name="T130">越少）越優先</text:span></text:p>
          </table:table-cell>
          <table:table-cell table:style-name="表格94.A3" office:value-type="string">
            <text:p text:style-name="P25" loext:marker-style-name="T129"><text:span text:style-name="T130">這才是 </text:span><text:span text:style-name="T170">AS-PATH </text:span><text:span text:style-name="T130">被使用的時機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78"><text:span text:style-name="T138">⑤</text:span><text:span text:style-name="T78"/></text:p>
          </table:table-cell>
          <table:table-cell table:style-name="表格94.A2" office:value-type="string">
            <text:p text:style-name="P25" loext:marker-style-name="T129"><text:span text:style-name="T170">Origin</text:span><text:span text:style-name="T129"/></text:p>
          </table:table-cell>
          <table:table-cell table:style-name="表格94.A2" office:value-type="string">
            <text:p text:style-name="P25" loext:marker-style-name="T129"><text:span text:style-name="T170">IGP &gt; EGP &gt; Incomplete</text:span><text:span text:style-name="T129"/></text:p>
          </table:table-cell>
          <table:table-cell table:style-name="表格94.A2" office:value-type="string">
            <text:p text:style-name="P25" loext:marker-style-name="T129"><text:span text:style-name="T130">來源越明確越好</text:span><text:span text:style-name="T129"/></text:p>
          </table:table-cell>
        </table:table-row>
        <text:soft-page-break/>
        <table:table-row table:style-name="表格94.1">
          <table:table-cell table:style-name="表格94.A3" office:value-type="string">
            <text:p text:style-name="P24" loext:marker-style-name="T78"><text:span text:style-name="T138">⑥</text:span><text:span text:style-name="T78"/></text:p>
          </table:table-cell>
          <table:table-cell table:style-name="表格94.A3" office:value-type="string">
            <text:p text:style-name="P25" loext:marker-style-name="T129"><text:span text:style-name="T170">MED</text:span><text:span text:style-name="T129"/></text:p>
          </table:table-cell>
          <table:table-cell table:style-name="表格94.A3" office:value-type="string">
            <text:p text:style-name="P25" loext:marker-style-name="T129"><text:span text:style-name="T130">數值越小越優先</text:span><text:span text:style-name="T129"/></text:p>
          </table:table-cell>
          <table:table-cell table:style-name="表格94.A3" office:value-type="string">
            <text:p text:style-name="P25" loext:marker-style-name="T129"><text:span text:style-name="T130">只比較同一個 </text:span><text:span text:style-name="T170">AS </text:span><text:span text:style-name="T130">來的路由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78"><text:span text:style-name="T138">⑦</text:span><text:span text:style-name="T78"/></text:p>
          </table:table-cell>
          <table:table-cell table:style-name="表格94.A2" office:value-type="string">
            <text:p text:style-name="P25" loext:marker-style-name="T129"><text:span text:style-name="T170">eBGP vs iBGP</text:span><text:span text:style-name="T129"/></text:p>
          </table:table-cell>
          <table:table-cell table:style-name="表格94.A2" office:value-type="string">
            <text:p text:style-name="P25" loext:marker-style-name="T129"><text:span text:style-name="T170">eBGP </text:span><text:span text:style-name="T130">優先於 </text:span><text:span text:style-name="T170">iBGP</text:span></text:p>
          </table:table-cell>
          <table:table-cell table:style-name="表格94.A2" office:value-type="string">
            <text:p text:style-name="P25" loext:marker-style-name="T129"><text:span text:style-name="T130">外部路由比內部同步更優先</text:span><text:span text:style-name="T129"/></text:p>
          </table:table-cell>
        </table:table-row>
        <table:table-row table:style-name="表格94.1">
          <table:table-cell table:style-name="表格94.A3" office:value-type="string">
            <text:p text:style-name="P24" loext:marker-style-name="T78"><text:span text:style-name="T138">⑧</text:span><text:span text:style-name="T78"/></text:p>
          </table:table-cell>
          <table:table-cell table:style-name="表格94.A3" office:value-type="string">
            <text:p text:style-name="P25" loext:marker-style-name="T129"><text:span text:style-name="T170">IGP cost</text:span><text:span text:style-name="T129"/></text:p>
          </table:table-cell>
          <table:table-cell table:style-name="表格94.A3" office:value-type="string">
            <text:p text:style-name="P25" loext:marker-style-name="T129"><text:span text:style-name="T130">到 </text:span><text:span text:style-name="T170">next-hop </text:span><text:span text:style-name="T130">距離越小越優先</text:span></text:p>
          </table:table-cell>
          <table:table-cell table:style-name="表格94.A3" office:value-type="string">
            <text:p text:style-name="P25" loext:marker-style-name="T129"><text:span text:style-name="T130">同一路由器內部的距離比較</text:span><text:span text:style-name="T129"/></text:p>
          </table:table-cell>
        </table:table-row>
        <table:table-row table:style-name="表格94.1">
          <table:table-cell table:style-name="表格94.A2" office:value-type="string">
            <text:p text:style-name="P24" loext:marker-style-name="T78"><text:span text:style-name="T138">⑨</text:span><text:span text:style-name="T78"/></text:p>
          </table:table-cell>
          <table:table-cell table:style-name="表格94.A2" office:value-type="string">
            <text:p text:style-name="P25" loext:marker-style-name="T129"><text:span text:style-name="T170">Router ID</text:span><text:span text:style-name="T129"/></text:p>
          </table:table-cell>
          <table:table-cell table:style-name="表格94.A2" office:value-type="string">
            <text:p text:style-name="P25" loext:marker-style-name="T129"><text:span text:style-name="T170">Router ID </text:span><text:span text:style-name="T130">最小的優先</text:span></text:p>
          </table:table-cell>
          <table:table-cell table:style-name="表格94.A2" office:value-type="string">
            <text:p text:style-name="P25" loext:marker-style-name="T129"><text:span text:style-name="T130">最後的決勝點</text:span><text:span text:style-name="T129"/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8"><text:span text:style-name="T176">🧠 <text:s/></text:span><text:span text:style-name="T226">白話理解（這句最重要）</text:span></text:p>
            <text:p text:style-name="P9" loext:marker-style-name="T101"><text:span text:style-name="T148">BGP </text:span><text:span text:style-name="T99">心裡在想：「哪條路比較值得信任？比較符合政策？」不是「哪條最短」（那是 </text:span><text:span text:style-name="T148">OSPF </text:span><text:span text:style-name="T99">在做的事）。</text:span></text:p>
            <text:p text:style-name="P10"><text:span text:style-name="T227">一句話總結 → </text:span><text:span text:style-name="T148">BGP </text:span><text:span text:style-name="T99">是政策導向（</text:span><text:span text:style-name="T148">policy-based routing</text:span><text:span text:style-name="T99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8"><text:span text:style-name="T176">⚡ <text:s/></text:span><text:span text:style-name="T180">考試口訣（</text:span><text:span text:style-name="T190">10 </text:span><text:span text:style-name="T180">秒背）</text:span></text:p>
            <text:p text:style-name="P9" loext:marker-style-name="T101"><text:span text:style-name="T148">Weight &gt; Local Pref &gt; </text:span><text:span text:style-name="T99">自己產生 </text:span><text:span text:style-name="T148">&gt; AS-PATH &gt; Origin &gt; MED &gt; eBGP &gt; IGP cost &gt; Router ID</text:span><text:span text:style-name="T99">（</text:span><text:span text:style-name="T148">Weight </text:span><text:span text:style-name="T99">為 </text:span><text:span text:style-name="T148">Cisco </text:span><text:span text:style-name="T99">私有；</text:span><text:span text:style-name="T148">Local Pref </text:span><text:span text:style-name="T99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9"><text:span text:style-name="T214">✗ AS-PATH </text:span><text:span text:style-name="T208">是 </text:span><text:span text:style-name="T214">BGP </text:span><text:span text:style-name="T208">選路最重要的屬性　→　</text:span><text:span text:style-name="T99">✓ </text:span><text:span text:style-name="T148">Local Preference </text:span><text:span text:style-name="T99">才是最重要的通用屬性（</text:span><text:span text:style-name="T148">Weight </text:span><text:span text:style-name="T99">是 </text:span><text:span text:style-name="T148">Cisco </text:span><text:span text:style-name="T99">私有）。</text:span></text:p>
            <text:p text:style-name="P10"><text:span text:style-name="T214">✗ AS-PATH </text:span><text:span text:style-name="T208">越短就一定會選那條　→　</text:span><text:span text:style-name="T99">✓ 只有前面的屬性（</text:span><text:span text:style-name="T148">Local Pref </text:span><text:span text:style-name="T99">等）完全相同時，才會比較 </text:span><text:span text:style-name="T148">AS-PATH</text:span><text:span text:style-name="T99">。</text:span></text:p>
            <text:p text:style-name="P10"><text:span text:style-name="T214">✗ BGP </text:span><text:span text:style-name="T208">會自己計算最短路徑　→　</text:span><text:span text:style-name="T99">✓ </text:span><text:span text:style-name="T148">BGP </text:span><text:span text:style-name="T99">不算距離，</text:span><text:span text:style-name="T148">OSPF </text:span><text:span text:style-name="T99">才做最短路徑計算。</text:span></text:p>
            <text:p text:style-name="P10"><text:span text:style-name="T214">✗ iBGP </text:span><text:span text:style-name="T208">比 </text:span><text:span text:style-name="T214">eBGP </text:span><text:span text:style-name="T208">優先　→　</text:span><text:span text:style-name="T99">✓ </text:span><text:span text:style-name="T148">eBGP </text:span><text:span text:style-name="T99">優先於 </text:span><text:span text:style-name="T148">iBGP</text:span><text:span text:style-name="T99">（外部路由更可信）。</text:span></text:p>
            <text:p text:style-name="P10"><text:span text:style-name="T214">✗ MED </text:span><text:span text:style-name="T208">可以跨不同 </text:span><text:span text:style-name="T214">AS </text:span><text:span text:style-name="T208">互相比較　→　</text:span><text:span text:style-name="T99">✓ </text:span><text:span text:style-name="T148">MED </text:span><text:span text:style-name="T99">只能比較來自同一個 </text:span><text:span text:style-name="T148">AS </text:span><text:span text:style-name="T99">的路由。</text:span></text:p>
          </table:table-cell>
        </table:table-row>
      </table:table>
      <text:h text:style-name="P2" text:outline-level="2" loext:marker-style-name="T27"><text:span text:style-name="T28">七、</text:span><text:span text:style-name="T27">BGP + NAT + </text:span><text:span text:style-name="T28">防火牆 整合流程</text:span></text:h>
      <text:p text:style-name="P32" loext:marker-style-name="T101"><text:span text:style-name="T99">把三個概念串在一起，這才是實務上封包實際走的路。情境：你的電腦要連到健保署，有兩條對外線路（中華電信 </text:span><text:span text:style-name="T148">AS-PATH </text:span><text:span text:style-name="T99">長度 </text:span><text:span text:style-name="T148">2</text:span><text:span text:style-name="T99">、台灣固網 </text:span><text:span text:style-name="T148">AS-PATH </text:span><text:span text:style-name="T99">長度 </text:span><text:span text:style-name="T148">3</text:span><text:span text:style-name="T99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6" loext:marker-style-name="T71"><text:span text:style-name="T70">步驟</text:span><text:span text:style-name="T71"/></text:p>
            </table:table-cell>
            <table:table-cell table:style-name="表格96.A1" office:value-type="string">
              <text:p text:style-name="P6" loext:marker-style-name="T71"><text:span text:style-name="T70">動作</text:span><text:span text:style-name="T71"/></text:p>
            </table:table-cell>
            <table:table-cell table:style-name="表格96.A1" office:value-type="string">
              <text:p text:style-name="P6" loext:marker-style-name="T71"><text:span text:style-name="T70">關鍵一句</text:span><text:span text:style-name="T71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 loext:marker-style-name="T129"><text:span text:style-name="T170">1 </text:span><text:span text:style-name="T130">封包產生</text:span></text:p>
          </table:table-cell>
          <table:table-cell table:style-name="表格96.A2" office:value-type="string">
            <text:p text:style-name="P25" loext:marker-style-name="T129"><text:span text:style-name="T130">你的電腦說「我要去健保署 </text:span><text:span text:style-name="T170">IP</text:span><text:span text:style-name="T130">」</text:span></text:p>
          </table:table-cell>
          <table:table-cell table:style-name="表格96.A2" office:value-type="string">
            <text:p text:style-name="P25" loext:marker-style-name="T129"><text:span text:style-name="T130">封包準備出發</text:span><text:span text:style-name="T129"/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29"><text:span text:style-name="T170">2 </text:span><text:span text:style-name="T130">防火牆 </text:span><text:span text:style-name="T170">Firewall</text:span></text:p>
          </table:table-cell>
          <table:table-cell table:style-name="表格96.A3" office:value-type="string">
            <text:p text:style-name="P25" loext:marker-style-name="T129"><text:span text:style-name="T130">看來源</text:span><text:span text:style-name="T170">/</text:span><text:span text:style-name="T130">目的 </text:span><text:span text:style-name="T170">IP</text:span><text:span text:style-name="T130">、</text:span><text:span text:style-name="T170">Port</text:span><text:span text:style-name="T130">，不符就擋掉</text:span></text:p>
          </table:table-cell>
          <table:table-cell table:style-name="表格96.A3" office:value-type="string">
            <text:p text:style-name="P25" loext:marker-style-name="T129"><text:span text:style-name="T130">防火牆決定「能不能走」</text:span><text:span text:style-name="T129"/></text:p>
          </table:table-cell>
        </table:table-row>
        <table:table-row table:style-name="表格96.1">
          <table:table-cell table:style-name="表格96.A2" office:value-type="string">
            <text:p text:style-name="P25" loext:marker-style-name="T129"><text:span text:style-name="T170">3 NAT</text:span><text:span text:style-name="T129"/></text:p>
          </table:table-cell>
          <table:table-cell table:style-name="表格96.A2" office:value-type="string">
            <text:p text:style-name="P25" loext:marker-style-name="T129"><text:span text:style-name="T130">把私有 </text:span><text:span text:style-name="T170">IP </text:span><text:span text:style-name="T130">換成公網 </text:span><text:span text:style-name="T170">IP</text:span><text:span text:style-name="T130">（</text:span><text:span text:style-name="T170">192.168.1.10 → 203.66.x.x</text:span><text:span text:style-name="T130">）</text:span></text:p>
          </table:table-cell>
          <table:table-cell table:style-name="表格96.A2" office:value-type="string">
            <text:p text:style-name="P25" loext:marker-style-name="T129"><text:span text:style-name="T170">NAT </text:span><text:span text:style-name="T130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29"><text:span text:style-name="T170">4 BGP </text:span><text:span text:style-name="T130">選路</text:span></text:p>
          </table:table-cell>
          <table:table-cell table:style-name="表格96.A3" office:value-type="string">
            <text:p text:style-name="P25" loext:marker-style-name="T129"><text:span text:style-name="T130">比條件：若相同選 </text:span><text:span text:style-name="T170">AS-PATH </text:span><text:span text:style-name="T130">較短路</text:span><text:span text:style-name="T170">1</text:span><text:span text:style-name="T130">；若中華電信 </text:span><text:span text:style-name="T170">Local Pref </text:span><text:span text:style-name="T130">較高則不管長短走路</text:span><text:span text:style-name="T170">1</text:span></text:p>
          </table:table-cell>
          <table:table-cell table:style-name="表格96.A3" office:value-type="string">
            <text:p text:style-name="P25" loext:marker-style-name="T129"><text:span text:style-name="T170">BGP </text:span><text:span text:style-name="T130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5" loext:marker-style-name="T129"><text:span text:style-name="T170">5 </text:span><text:span text:style-name="T130">出 </text:span><text:span text:style-name="T170">ISP </text:span><text:span text:style-name="T130">跨 </text:span><text:span text:style-name="T170">AS</text:span></text:p>
          </table:table-cell>
          <table:table-cell table:style-name="表格96.A2" office:value-type="string">
            <text:p text:style-name="P25" loext:marker-style-name="T129"><text:span text:style-name="T130">封包經過多個 </text:span><text:span text:style-name="T170">AS</text:span><text:span text:style-name="T130">（這就是 </text:span><text:span text:style-name="T170">AS-PATH </text:span><text:span text:style-name="T130">的來源）</text:span></text:p>
          </table:table-cell>
          <table:table-cell table:style-name="表格96.A2" office:value-type="string">
            <text:p text:style-name="P25" loext:marker-style-name="T129"><text:span text:style-name="T170">—</text:span><text:span text:style-name="T129"/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29"><text:span text:style-name="T170">6 </text:span><text:span text:style-name="T130">到達健保署</text:span></text:p>
          </table:table-cell>
          <table:table-cell table:style-name="表格96.A3" office:value-type="string">
            <text:p text:style-name="P25" loext:marker-style-name="T129"><text:span text:style-name="T130">健保署收到請求，完成連線</text:span><text:span text:style-name="T129"/></text:p>
          </table:table-cell>
          <table:table-cell table:style-name="表格96.A3" office:value-type="string">
            <text:p text:style-name="P25" loext:marker-style-name="T129"><text:span text:style-name="T170">—</text:span><text:span text:style-name="T129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8"><text:span text:style-name="T176">🎯 <text:s/></text:span><text:span text:style-name="T226">三層分工，一句話各自記</text:span></text:p>
            <text:p text:style-name="P9"><text:span text:style-name="T227">防火牆 → </text:span><text:span text:style-name="T99">決定「能不能走」｜</text:span><text:span text:style-name="T233">NAT → </text:span><text:span text:style-name="T99">解決「你是誰」｜</text:span><text:span text:style-name="T233">BGP → </text:span><text:span text:style-name="T99">決定「要怎麼走」</text:span></text:p>
            <text:p text:style-name="P10" loext:marker-style-name="T101"><text:span text:style-name="T99">生活比喻：海關（防火牆）→ 換護照</text:span><text:span text:style-name="T148">/</text:span><text:span text:style-name="T99">身份（</text:span><text:span text:style-name="T148">NAT</text:span><text:span text:style-name="T99">）→ 選航班（</text:span><text:span text:style-name="T148">BGP</text:span><text:span text:style-name="T99">）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8"><text:span text:style-name="T176">⚠️ <text:s/></text:span><text:span text:style-name="T198">整合情境的考試陷阱</text:span></text:p>
            <text:p text:style-name="P9"><text:span text:style-name="T214">✗ </text:span><text:span text:style-name="T208">封包送不出去 → 一定是 </text:span><text:span text:style-name="T214">BGP </text:span><text:span text:style-name="T208">問題　→　</text:span><text:span text:style-name="T99">✓ 應依序排查：防火牆有沒有擋？</text:span><text:span text:style-name="T148">NAT </text:span><text:span text:style-name="T99">有沒有設？</text:span><text:span text:style-name="T148">BGP </text:span><text:span text:style-name="T99">有沒有路？</text:span></text:p>
            <text:p text:style-name="P10"><text:soft-page-break/><text:span text:style-name="T214">✗ </text:span><text:span text:style-name="T208">有路但連不到 → 是 </text:span><text:span text:style-name="T214">BGP </text:span><text:span text:style-name="T208">路由問題　→　</text:span><text:span text:style-name="T99">✓ 通常是防火牆或 </text:span><text:span text:style-name="T148">NAT </text:span><text:span text:style-name="T99">問題，不是 </text:span><text:span text:style-name="T148">BGP</text:span><text:span text:style-name="T99">。</text:span></text:p>
            <text:p text:style-name="P10"><text:span text:style-name="T214">✗ </text:span><text:span text:style-name="T208">走到錯誤的 </text:span><text:span text:style-name="T214">ISP → </text:span><text:span text:style-name="T208">是 </text:span><text:span text:style-name="T214">NAT </text:span><text:span text:style-name="T208">設定問題　→　</text:span><text:span text:style-name="T99">✓ 走到錯誤 </text:span><text:span text:style-name="T148">ISP </text:span><text:span text:style-name="T99">是 </text:span><text:span text:style-name="T148">BGP </text:span><text:span text:style-name="T99">選路問題（</text:span><text:span text:style-name="T148">Local Pref </text:span><text:span text:style-name="T99">或 </text:span><text:span text:style-name="T148">AS-PATH </text:span><text:span text:style-name="T99">設定不對）。</text:span></text:p>
          </table:table-cell>
          <table:covered-table-cell/>
          <table:covered-table-cell/>
        </table:table-row>
      </table:table>
      <text:h text:style-name="P13" text:outline-level="1" loext:marker-style-name="T67"><text:span text:style-name="T66">第 八 篇　網路系統進階：</text:span><text:span text:style-name="T67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8"><text:span text:style-name="T176">🌐 <text:s/></text:span><text:span text:style-name="T47">本篇重點</text:span></text:p>
            <text:p text:style-name="P9" loext:marker-style-name="T101"><text:span text:style-name="T99">本篇涵蓋四大現代網路主題：</text:span><text:span text:style-name="T148">SDN</text:span><text:span text:style-name="T99">（網路如何被控制）、</text:span><text:span text:style-name="T148">Load Balancing</text:span><text:span text:style-name="T99">（流量如何分配）、</text:span><text:span text:style-name="T148">CDN</text:span><text:span text:style-name="T99">（網站如何加速）、</text:span><text:span text:style-name="T148">5G</text:span><text:span text:style-name="T99">（新世代行動網路特性）。</text:span></text:p>
          </table:table-cell>
        </table:table-row>
      </table:table>
      <text:h text:style-name="P2" text:outline-level="2" loext:marker-style-name="T27"><text:span text:style-name="T28">一、</text:span><text:span text:style-name="T27">SDN</text:span><text:span text:style-name="T28">（軟體定義網路）</text:span></text:h>
      <text:p text:style-name="P32" loext:marker-style-name="T101"><text:span text:style-name="T148">SDN</text:span><text:span text:style-name="T99">（</text:span><text:span text:style-name="T148">Software Defined Networking</text:span><text:span text:style-name="T99">）的核心概念是：將「控制平面」與「資料平面」分離。傳統網路中路由器和交換器同時負責「決定資料走哪條路」和「實際傳送資料」，</text:span><text:span text:style-name="T148">SDN </text:span><text:span text:style-name="T99">則把「決策」抽出來交給集中式的 </text:span><text:span text:style-name="T148">Controller </text:span><text:span text:style-name="T99">統一管理。（</text:span><text:span text:style-name="T148">Router</text:span><text:span text:style-name="T99">：負責「不同網路之間」傳資料；</text:span><text:span text:style-name="T148">Switch</text:span><text:span text:style-name="T99">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8"><text:span text:style-name="T176">🟦 <text:s/></text:span><text:span text:style-name="T226">核心概念（考試最常考）</text:span></text:p>
            <text:p text:style-name="P9"><text:span text:style-name="T227">控制平面（</text:span><text:span text:style-name="T233">Control Plane</text:span><text:span text:style-name="T227">）：</text:span><text:span text:style-name="T99">決定資料「怎麼走」——負責路由決策的大腦。</text:span></text:p>
            <text:p text:style-name="P10"><text:span text:style-name="T227">資料平面（</text:span><text:span text:style-name="T233">Data Plane</text:span><text:span text:style-name="T227">）：</text:span><text:span text:style-name="T99">負責資料「實際傳送」——執行指令的手腳。</text:span></text:p>
            <text:p text:style-name="P10"><text:span text:style-name="T233">🔑 </text:span><text:span text:style-name="T227">關鍵：</text:span><text:span text:style-name="T99">兩者分離，是 </text:span><text:span text:style-name="T148">SDN </text:span><text:span text:style-name="T99">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6" loext:marker-style-name="T71"><text:span text:style-name="T70">三層架構</text:span><text:span text:style-name="T71"/></text:p>
          </table:table-cell>
          <table:table-cell table:style-name="表格98.A2" office:value-type="string">
            <text:p text:style-name="P6" loext:marker-style-name="T71"><text:span text:style-name="T70">說明</text:span><text:span text:style-name="T71"/></text:p>
          </table:table-cell>
          <table:table-cell table:style-name="表格98.A2" office:value-type="string">
            <text:p text:style-name="P6" loext:marker-style-name="T71"><text:span text:style-name="T70">白話</text:span><text:span text:style-name="T71"/></text:p>
          </table:table-cell>
        </table:table-row>
        <table:table-row table:style-name="表格98.1">
          <table:table-cell table:style-name="表格98.A3" office:value-type="string">
            <text:p text:style-name="P25" loext:marker-style-name="T129"><text:span text:style-name="T170">🟦 Application Layer </text:span><text:span text:style-name="T130">應用層</text:span></text:p>
          </table:table-cell>
          <table:table-cell table:style-name="表格98.A3" office:value-type="string">
            <text:p text:style-name="P25" loext:marker-style-name="T129"><text:span text:style-name="T130">使用者所使用的服務，如網頁、</text:span><text:span text:style-name="T170">API</text:span><text:span text:style-name="T130">、</text:span><text:span text:style-name="T170">App</text:span></text:p>
          </table:table-cell>
          <table:table-cell table:style-name="表格98.A3" office:value-type="string">
            <text:p text:style-name="P25" loext:marker-style-name="T129"><text:span text:style-name="T130">你真正在用的東西</text:span><text:span text:style-name="T129"/></text:p>
          </table:table-cell>
        </table:table-row>
        <table:table-row table:style-name="表格98.1">
          <table:table-cell table:style-name="表格98.A4" office:value-type="string">
            <text:p text:style-name="P25" loext:marker-style-name="T129"><text:span text:style-name="T170">🟨 Control Layer </text:span><text:span text:style-name="T130">控制層</text:span></text:p>
          </table:table-cell>
          <table:table-cell table:style-name="表格98.A4" office:value-type="string">
            <text:p text:style-name="P25" loext:marker-style-name="T129"><text:span text:style-name="T170">SDN Controller</text:span><text:span text:style-name="T130">（大腦），決定資料流向、集中管理</text:span></text:p>
          </table:table-cell>
          <table:table-cell table:style-name="表格98.A4" office:value-type="string">
            <text:p text:style-name="P25" loext:marker-style-name="T129"><text:span text:style-name="T130">交通指揮中心</text:span><text:span text:style-name="T129"/></text:p>
          </table:table-cell>
        </table:table-row>
        <table:table-row table:style-name="表格98.1">
          <table:table-cell table:style-name="表格98.A3" office:value-type="string">
            <text:p text:style-name="P25" loext:marker-style-name="T129"><text:span text:style-name="T170">🟩 Infrastructure Layer </text:span><text:span text:style-name="T130">基礎層</text:span></text:p>
          </table:table-cell>
          <table:table-cell table:style-name="表格98.A3" office:value-type="string">
            <text:p text:style-name="P25" loext:marker-style-name="T129"><text:span text:style-name="T130">真正傳送資料的設備，如 </text:span><text:span text:style-name="T170">Router</text:span><text:span text:style-name="T130">、</text:span><text:span text:style-name="T170">Switch</text:span></text:p>
          </table:table-cell>
          <table:table-cell table:style-name="表格98.A3" office:value-type="string">
            <text:p text:style-name="P25" loext:marker-style-name="T129"><text:span text:style-name="T130">路、車道和車子</text:span><text:span text:style-name="T129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8"><text:span text:style-name="T176">⚡ <text:s/></text:span><text:span text:style-name="T180">記憶口訣</text:span></text:p>
            <text:p text:style-name="P9" loext:marker-style-name="T101"><text:span text:style-name="T99">「</text:span><text:span text:style-name="T148">SDN </text:span><text:span text:style-name="T99">分平面、三層 </text:span><text:span text:style-name="T148">App-</text:span><text:span text:style-name="T99">控</text:span><text:span text:style-name="T148">-</text:span><text:span text:style-name="T99">基」→ 分平面＝控制／資料分離；三層＝</text:span><text:span text:style-name="T148">Application / Control / Infrastructure</text:span><text:span text:style-name="T99">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二、</text:span><text:span text:style-name="T27">Load Balancing</text:span><text:span text:style-name="T28">（負載平衡）</text:span></text:h>
      <text:p text:style-name="P32" loext:marker-style-name="T101"><text:span text:style-name="T99">當大量使用者同時存取同一網站，單一台伺服器會不堪負荷。負載平衡器把流量「智慧分配」到多台伺服器，確保每台都不過載。</text:span><text:span text:style-name="T101"/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6" loext:marker-style-name="T71"><text:span text:style-name="T70">策略</text:span><text:span text:style-name="T71"/></text:p>
            </table:table-cell>
            <table:table-cell table:style-name="表格99.A1" office:value-type="string">
              <text:p text:style-name="P6" loext:marker-style-name="T71"><text:span text:style-name="T70">說明</text:span><text:span text:style-name="T71"/></text:p>
            </table:table-cell>
            <table:table-cell table:style-name="表格99.A1" office:value-type="string">
              <text:p text:style-name="P6" loext:marker-style-name="T71"><text:span text:style-name="T70">優 </text:span><text:span text:style-name="T76">/ </text:span><text:span text:style-name="T70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5" loext:marker-style-name="T129"><text:span text:style-name="T170">① Round Robin</text:span><text:span text:style-name="T130">（輪詢）</text:span></text:p>
          </table:table-cell>
          <table:table-cell table:style-name="表格99.A2" office:value-type="string">
            <text:p text:style-name="P25" loext:marker-style-name="T129"><text:span text:style-name="T130">依序輪流分配，不考慮伺服器效能或負載</text:span><text:span text:style-name="T129"/></text:p>
          </table:table-cell>
          <table:table-cell table:style-name="表格99.A2" office:value-type="string">
            <text:p text:style-name="P25" loext:marker-style-name="T129"><text:span text:style-name="T170">✓ </text:span><text:span text:style-name="T130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5" loext:marker-style-name="T129"><text:span text:style-name="T170">② Weighted Round Robin</text:span><text:span text:style-name="T130">（加權輪詢）</text:span></text:p>
          </table:table-cell>
          <table:table-cell table:style-name="表格99.A3" office:value-type="string">
            <text:p text:style-name="P25" loext:marker-style-name="T129"><text:span text:style-name="T130">依各伺服器處理能力設「權重」，能力強分到更多</text:span><text:span text:style-name="T129"/></text:p>
          </table:table-cell>
          <table:table-cell table:style-name="表格99.A3" office:value-type="string">
            <text:p text:style-name="P25" loext:marker-style-name="T129"><text:span text:style-name="T170">✓ </text:span><text:span text:style-name="T130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5" loext:marker-style-name="T129"><text:span text:style-name="T170">③ Session Stickiness</text:span><text:span text:style-name="T130">（會話黏著）</text:span></text:p>
          </table:table-cell>
          <table:table-cell table:style-name="表格99.A2" office:value-type="string">
            <text:p text:style-name="P25" loext:marker-style-name="T129"><text:span text:style-name="T130">同一使用者所有請求固定導向同一台，維持連線狀態</text:span><text:span text:style-name="T129"/></text:p>
          </table:table-cell>
          <table:table-cell table:style-name="表格99.A2" office:value-type="string">
            <text:p text:style-name="P25" loext:marker-style-name="T129"><text:span text:style-name="T170">✓ </text:span><text:span text:style-name="T130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8"><text:span text:style-name="T176">⚡ <text:s/></text:span><text:span text:style-name="T180">記憶口訣</text:span></text:p>
            <text:p text:style-name="P9" loext:marker-style-name="T101"><text:span text:style-name="T99">「</text:span><text:span text:style-name="T148">LB </text:span><text:span text:style-name="T99">輪、重、黏」→ 輪＝</text:span><text:span text:style-name="T148">Round Robin</text:span><text:span text:style-name="T99">（輪流）；重＝</text:span><text:span text:style-name="T148">Weighted RR</text:span><text:span text:style-name="T99">（加權）；黏＝</text:span><text:span text:style-name="T148">Stickiness</text:span><text:span text:style-name="T99">（固定同一台）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三、</text:span><text:span text:style-name="T27">CDN</text:span><text:span text:style-name="T28">（內容傳遞網路）</text:span></text:h>
      <text:p text:style-name="P32" loext:marker-style-name="T101"><text:span text:style-name="T148">CDN</text:span><text:span text:style-name="T99">（</text:span><text:span text:style-name="T148">Content Delivery Network</text:span><text:span text:style-name="T99">）透過在全球各地部署「邊緣伺服器（</text:span><text:span text:style-name="T148">Edge Server</text:span><text:span text:style-name="T99">）」加速內容傳</text:span><text:soft-page-break/><text:span text:style-name="T99">遞。當你開啟 </text:span><text:span text:style-name="T148">Google </text:span><text:span text:style-name="T99">或 </text:span><text:span text:style-name="T148">YouTube</text:span><text:span text:style-name="T99">，不需跨越太平洋連到美國總部，而是連到你附近的 </text:span><text:span text:style-name="T148">CDN </text:span><text:span text:style-name="T99">節點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8"><text:span text:style-name="T176">🌍 <text:s/></text:span><text:span text:style-name="T58">CDN </text:span><text:span text:style-name="T47">完整流程（一定要記）</text:span></text:p>
            <text:p text:style-name="P9" loext:marker-style-name="T101"><text:span text:style-name="T148">Step 1 </text:span><text:span text:style-name="T99">使用者輸入網址（</text:span><text:span text:style-name="T148">www.example.com</text:span><text:span text:style-name="T99">）</text:span></text:p>
            <text:p text:style-name="P10" loext:marker-style-name="T101"><text:span text:style-name="T148">Step 2 DNS </text:span><text:span text:style-name="T99">解析網址，找到對應 </text:span><text:span text:style-name="T148">CDN </text:span><text:span text:style-name="T99">的 </text:span><text:span text:style-name="T148">CNAME </text:span><text:span text:style-name="T99">記錄</text:span></text:p>
            <text:p text:style-name="P10" loext:marker-style-name="T101"><text:span text:style-name="T148">Step 3 CNAME </text:span><text:span text:style-name="T99">將請求轉向 </text:span><text:span text:style-name="T148">CDN </text:span><text:span text:style-name="T99">服務商（如 </text:span><text:span text:style-name="T148">cdn.example.net</text:span><text:span text:style-name="T99">）</text:span></text:p>
            <text:p text:style-name="P10" loext:marker-style-name="T101"><text:span text:style-name="T148">Step 4 CDN </text:span><text:span text:style-name="T99">根據使用者地理位置，選擇最近的 </text:span><text:span text:style-name="T148">Edge </text:span><text:span text:style-name="T99">伺服器</text:span></text:p>
            <text:p text:style-name="P10" loext:marker-style-name="T101"><text:span text:style-name="T148">Step 5 Edge </text:span><text:span text:style-name="T99">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6" loext:marker-style-name="T65"><text:span text:style-name="T64">關鍵名詞</text:span><text:span text:style-name="T65"/></text:p>
          </table:table-cell>
          <table:table-cell table:style-name="表格100.A2" office:value-type="string">
            <text:p text:style-name="P6" loext:marker-style-name="T65"><text:span text:style-name="T64">說明</text:span><text:span text:style-name="T65"/></text:p>
          </table:table-cell>
        </table:table-row>
        <table:table-row table:style-name="表格100.1">
          <table:table-cell table:style-name="表格100.A3" office:value-type="string">
            <text:p text:style-name="P25" loext:marker-style-name="T78"><text:span text:style-name="T138">CNAME</text:span><text:span text:style-name="T77">（別名記錄）</text:span></text:p>
          </table:table-cell>
          <table:table-cell table:style-name="表格100.A3" office:value-type="string">
            <text:p text:style-name="P25" loext:marker-style-name="T78"><text:span text:style-name="T138">DNS </text:span><text:span text:style-name="T77">的一種記錄，作用是「網址指向另一個網址」（不是 </text:span><text:span text:style-name="T138">IP</text:span><text:span text:style-name="T77">）。範例：</text:span><text:span text:style-name="T138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5" loext:marker-style-name="T78"><text:span text:style-name="T138">Edge Server</text:span><text:span text:style-name="T77">（邊緣伺服器）</text:span></text:p>
          </table:table-cell>
          <table:table-cell table:style-name="表格100.A4" office:value-type="string">
            <text:p text:style-name="P25" loext:marker-style-name="T78"><text:span text:style-name="T77">部署在全球各地靠近使用者的伺服器，負責快取並就近回應請求，大幅減少延遲。</text:span><text:span text:style-name="T78"/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8"><text:span text:style-name="T176">⚡ <text:s/></text:span><text:span text:style-name="T180">記憶口訣</text:span></text:p>
            <text:p text:style-name="P9" loext:marker-style-name="T101"><text:span text:style-name="T99">「</text:span><text:span text:style-name="T148">CDN</text:span><text:span text:style-name="T99">：網址轉轉轉，資料找最近」→ </text:span><text:span text:style-name="T148">CNAME</text:span><text:span text:style-name="T99">＝網址→網址（不是 </text:span><text:span text:style-name="T148">IP</text:span><text:span text:style-name="T99">！）；</text:span><text:span text:style-name="T148">Edge</text:span><text:span text:style-name="T99">＝就近服務，不用跑遠。</text:span></text:p>
          </table:table-cell>
          <table:covered-table-cell/>
        </table:table-row>
      </table:table>
      <text:h text:style-name="P2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6" loext:marker-style-name="T71"><text:span text:style-name="T70">四大核心特性</text:span><text:span text:style-name="T71"/></text:p>
            </table:table-cell>
            <table:table-cell table:style-name="表格101.A1" office:value-type="string">
              <text:p text:style-name="P6" loext:marker-style-name="T71"><text:span text:style-name="T70">說明</text:span><text:span text:style-name="T71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5" loext:marker-style-name="T129"><text:span text:style-name="T170">① </text:span><text:span text:style-name="T130">高速傳輸（</text:span><text:span text:style-name="T170">eMBB</text:span><text:span text:style-name="T130">）</text:span></text:p>
          </table:table-cell>
          <table:table-cell table:style-name="表格101.A2" office:value-type="string">
            <text:p text:style-name="P25" loext:marker-style-name="T129"><text:span text:style-name="T170">Enhanced Mobile Broadband — </text:span><text:span text:style-name="T130">比 </text:span><text:span text:style-name="T170">4G </text:span><text:span text:style-name="T130">快數十倍，適合高畫質影音、</text:span><text:span text:style-name="T170">AR/VR</text:span></text:p>
          </table:table-cell>
        </table:table-row>
        <table:table-row table:style-name="表格101.1">
          <table:table-cell table:style-name="表格101.A3" office:value-type="string">
            <text:p text:style-name="P25" loext:marker-style-name="T129"><text:span text:style-name="T170">② </text:span><text:span text:style-name="T130">超低延遲（</text:span><text:span text:style-name="T170">URLLC</text:span><text:span text:style-name="T130">）</text:span></text:p>
          </table:table-cell>
          <table:table-cell table:style-name="表格101.A3" office:value-type="string">
            <text:p text:style-name="P25" loext:marker-style-name="T129"><text:span text:style-name="T170">Ultra-Reliable Low Latency — </text:span><text:span text:style-name="T130">延遲低至 </text:span><text:span text:style-name="T170">1ms </text:span><text:span text:style-name="T130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5" loext:marker-style-name="T129"><text:span text:style-name="T170">③ </text:span><text:span text:style-name="T130">大量連線（</text:span><text:span text:style-name="T170">mMTC</text:span><text:span text:style-name="T130">）</text:span></text:p>
          </table:table-cell>
          <table:table-cell table:style-name="表格101.A2" office:value-type="string">
            <text:p text:style-name="P25" loext:marker-style-name="T129"><text:span text:style-name="T170">Massive Machine Type — </text:span><text:span text:style-name="T130">每平方公里可連數百萬台裝置，適合 </text:span><text:span text:style-name="T170">IoT </text:span><text:span text:style-name="T130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5" loext:marker-style-name="T129"><text:span text:style-name="T170">④ </text:span><text:span text:style-name="T130">網路切片（</text:span><text:span text:style-name="T170">Network Slicing</text:span><text:span text:style-name="T130">）</text:span></text:p>
          </table:table-cell>
          <table:table-cell table:style-name="表格101.A3" office:value-type="string">
            <text:p text:style-name="P25" loext:marker-style-name="T129"><text:span text:style-name="T130">將同一物理網路虛擬化為多個獨立「切片」，各自不同 </text:span><text:span text:style-name="T170">QoS</text:span><text:span text:style-name="T130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8"><text:span text:style-name="T176">⚡ <text:s/></text:span><text:span text:style-name="T180">記憶口訣</text:span></text:p>
            <text:p text:style-name="P9" loext:marker-style-name="T101"><text:span text:style-name="T99">「</text:span><text:span text:style-name="T148">5G </text:span><text:span text:style-name="T99">快、低、多、切」→ 快（</text:span><text:span text:style-name="T148">eMBB</text:span><text:span text:style-name="T99">）＝高速；低（</text:span><text:span text:style-name="T148">URLLC</text:span><text:span text:style-name="T99">）＝超低延遲；多（</text:span><text:span text:style-name="T148">mMTC</text:span><text:span text:style-name="T99">）＝大量連線；切＝網路切片。</text:span></text:p>
          </table:table-cell>
          <table:covered-table-cell/>
        </table:table-row>
      </table:table>
      <text:h text:style-name="P2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6" loext:marker-style-name="T71"><text:span text:style-name="T70">常見錯誤</text:span><text:span text:style-name="T71"/></text:p>
            </table:table-cell>
            <table:table-cell table:style-name="表格102.A1" office:value-type="string">
              <text:p text:style-name="P6" loext:marker-style-name="T71"><text:span text:style-name="T70">正確觀念</text:span><text:span text:style-name="T71"/></text:p>
            </table:table-cell>
            <table:table-cell table:style-name="表格102.A1" office:value-type="string">
              <text:p text:style-name="P6" loext:marker-style-name="T71"><text:span text:style-name="T70">主題</text:span><text:span text:style-name="T71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5" loext:marker-style-name="T129"><text:span text:style-name="T170">SDN </text:span><text:span text:style-name="T130">是把控制與資料整合</text:span></text:p>
          </table:table-cell>
          <table:table-cell table:style-name="表格102.A2" office:value-type="string">
            <text:p text:style-name="P25" loext:marker-style-name="T129"><text:span text:style-name="T170">SDN = </text:span><text:span text:style-name="T130">控制與資料「分離」</text:span></text:p>
          </table:table-cell>
          <table:table-cell table:style-name="表格102.A2" office:value-type="string">
            <text:p text:style-name="P25" loext:marker-style-name="T129"><text:span text:style-name="T170">SDN</text:span><text:span text:style-name="T129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29"><text:span text:style-name="T170">Round Robin </text:span><text:span text:style-name="T130">會考慮伺服器效能</text:span></text:p>
          </table:table-cell>
          <table:table-cell table:style-name="表格102.A3" office:value-type="string">
            <text:p text:style-name="P25" loext:marker-style-name="T129"><text:span text:style-name="T170">RR </text:span><text:span text:style-name="T130">不看效能，</text:span><text:span text:style-name="T170">Weighted RR </text:span><text:span text:style-name="T130">才看</text:span></text:p>
          </table:table-cell>
          <table:table-cell table:style-name="表格102.A3" office:value-type="string">
            <text:p text:style-name="P25" loext:marker-style-name="T129"><text:span text:style-name="T170">LB</text:span><text:span text:style-name="T129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29"><text:span text:style-name="T170">Stickiness </text:span><text:span text:style-name="T130">是平均分配流量</text:span></text:p>
          </table:table-cell>
          <table:table-cell table:style-name="表格102.A2" office:value-type="string">
            <text:p text:style-name="P25" loext:marker-style-name="T129"><text:span text:style-name="T170">Stickiness = </text:span><text:span text:style-name="T130">固定同一台 </text:span><text:span text:style-name="T170">Server</text:span></text:p>
          </table:table-cell>
          <table:table-cell table:style-name="表格102.A2" office:value-type="string">
            <text:p text:style-name="P25" loext:marker-style-name="T129"><text:span text:style-name="T170">LB</text:span><text:span text:style-name="T129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29"><text:span text:style-name="T170">CDN </text:span><text:span text:style-name="T130">是把資料放在中心機房</text:span></text:p>
          </table:table-cell>
          <table:table-cell table:style-name="表格102.A3" office:value-type="string">
            <text:p text:style-name="P25" loext:marker-style-name="T129"><text:span text:style-name="T170">CDN </text:span><text:span text:style-name="T130">放在靠近使用者的 </text:span><text:span text:style-name="T170">Edge </text:span><text:span text:style-name="T130">節點</text:span></text:p>
          </table:table-cell>
          <table:table-cell table:style-name="表格102.A3" office:value-type="string">
            <text:p text:style-name="P25" loext:marker-style-name="T129"><text:span text:style-name="T170">CDN</text:span><text:span text:style-name="T129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29"><text:span text:style-name="T170">CNAME </text:span><text:span text:style-name="T130">是 </text:span><text:span text:style-name="T170">IP </text:span><text:span text:style-name="T130">位址的對應</text:span></text:p>
          </table:table-cell>
          <table:table-cell table:style-name="表格102.A2" office:value-type="string">
            <text:p text:style-name="P25" loext:marker-style-name="T129"><text:span text:style-name="T170">CNAME = </text:span><text:span text:style-name="T130">網址 → 網址（非 </text:span><text:span text:style-name="T170">IP</text:span><text:span text:style-name="T130">）</text:span></text:p>
          </table:table-cell>
          <table:table-cell table:style-name="表格102.A2" office:value-type="string">
            <text:p text:style-name="P25" loext:marker-style-name="T129"><text:span text:style-name="T170">CDN</text:span><text:span text:style-name="T129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29"><text:span text:style-name="T170">WiFi </text:span><text:span text:style-name="T130">使用 </text:span><text:span text:style-name="T170">CSMA/CD</text:span></text:p>
          </table:table-cell>
          <table:table-cell table:style-name="表格102.A3" office:value-type="string">
            <text:p text:style-name="P25" loext:marker-style-name="T129"><text:span text:style-name="T170">WiFi </text:span><text:span text:style-name="T130">用 </text:span><text:span text:style-name="T170">CSMA/CA</text:span><text:span text:style-name="T130">（</text:span><text:span text:style-name="T170">CD </text:span><text:span text:style-name="T130">是有線網路）</text:span></text:p>
          </table:table-cell>
          <table:table-cell table:style-name="表格102.A3" office:value-type="string">
            <text:p text:style-name="P25" loext:marker-style-name="T129"><text:span text:style-name="T170">WiFi</text:span><text:span text:style-name="T129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29"><text:span text:style-name="T170">5G </text:span><text:span text:style-name="T130">只是速度變快</text:span></text:p>
          </table:table-cell>
          <table:table-cell table:style-name="表格102.A2" office:value-type="string">
            <text:p text:style-name="P25" loext:marker-style-name="T129"><text:span text:style-name="T170">5G </text:span><text:span text:style-name="T130">還有低延遲、大量連線、網路切片</text:span></text:p>
          </table:table-cell>
          <table:table-cell table:style-name="表格102.A2" office:value-type="string">
            <text:p text:style-name="P25" loext:marker-style-name="T129"><text:span text:style-name="T170">5G</text:span><text:span text:style-name="T129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8"><text:span text:style-name="T176">🔗 <text:s/></text:span><text:span text:style-name="T47">使用情境串連（理解記憶）</text:span><text:soft-page-break/></text:p>
            <text:p text:style-name="P9" loext:marker-style-name="T101"><text:span text:style-name="T99">想像你用手機打開 </text:span><text:span text:style-name="T148">App</text:span><text:span text:style-name="T99">：① 開啟 </text:span><text:span text:style-name="T148">App → Application Layer</text:span><text:span text:style-name="T99">；② </text:span><text:span text:style-name="T148">SDN Controller </text:span><text:span text:style-name="T99">決定資料怎麼走 → </text:span><text:span text:style-name="T148">Control Layer</text:span><text:span text:style-name="T99">；③ </text:span><text:span text:style-name="T148">Router/Switch </text:span><text:span text:style-name="T99">實際傳送 → </text:span><text:span text:style-name="T148">Infrastructure Layer</text:span><text:span text:style-name="T99">；④ </text:span><text:span text:style-name="T148">Load Balancer </text:span><text:span text:style-name="T99">把請求分配到空閒伺服器 → </text:span><text:span text:style-name="T148">Load Balancing</text:span><text:span text:style-name="T99">；⑤ </text:span><text:span text:style-name="T148">CDN </text:span><text:span text:style-name="T99">找最近節點傳回網頁 → </text:span><text:span text:style-name="T148">CDN Edge</text:span><text:span text:style-name="T99">；⑥ 資料透過 </text:span><text:span text:style-name="T148">WiFi </text:span><text:span text:style-name="T99">或 </text:span><text:span text:style-name="T148">5G </text:span><text:span text:style-name="T99">傳到你的手機。</text:span></text:p>
          </table:table-cell>
          <table:covered-table-cell/>
          <table:covered-table-cell/>
        </table:table-row>
      </table:table>
      <text:h text:style-name="P13" text:outline-level="1" loext:marker-style-name="T67"><text:span text:style-name="T66">第 九 篇　無線通訊：</text:span><text:span text:style-name="T67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8"><text:span text:style-name="T176">💡 <text:s/></text:span><text:span text:style-name="T47">核心問題：大家同時說話會怎樣？</text:span></text:p>
            <text:p text:style-name="P9" loext:marker-style-name="T101"><text:span text:style-name="T99">很多裝置想用無線電波傳資料，若同時傳訊號會「撞在一起」。這個「決定誰先傳」的規則，就叫 </text:span><text:span text:style-name="T148">MAC </text:span><text:span text:style-name="T99">機制（</text:span><text:span text:style-name="T148">Media Access Control</text:span><text:span text:style-name="T99">）。⚠️ 注意：這裡的 </text:span><text:span text:style-name="T148">MAC </text:span><text:span text:style-name="T99">指「誰先傳資料的規則」，不是 </text:span><text:span text:style-name="T148">MAC </text:span><text:span text:style-name="T99">位址（硬體位址）！</text:span></text:p>
          </table:table-cell>
        </table:table-row>
      </table:table>
      <text:h text:style-name="P2" text:outline-level="2" loext:marker-style-name="T27"><text:span text:style-name="T28">一、</text:span><text:span text:style-name="T27">WiFi</text:span><text:span text:style-name="T28">：先聽再講（</text:span><text:span text:style-name="T27">CSMA/CA</text:span><text:span text:style-name="T28">）</text:span></text:h>
      <text:p text:style-name="P32" loext:marker-style-name="T101"><text:span text:style-name="T148">WiFi </text:span><text:span text:style-name="T99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6" loext:marker-style-name="T65"><text:span text:style-name="T74">CSMA/CA </text:span><text:span text:style-name="T64">拆解</text:span></text:p>
            </table:table-cell>
            <table:table-cell table:style-name="表格104.A1" office:value-type="string">
              <text:p text:style-name="P6" loext:marker-style-name="T65"><text:span text:style-name="T64">意義</text:span><text:span text:style-name="T65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5" loext:marker-style-name="T78"><text:span text:style-name="T138">Carrier Sense </text:span><text:span text:style-name="T77">載波感測</text:span></text:p>
          </table:table-cell>
          <table:table-cell table:style-name="表格104.A2" office:value-type="string">
            <text:p text:style-name="P25" loext:marker-style-name="T78"><text:span text:style-name="T77">先聽頻道有沒有人在用</text:span><text:span text:style-name="T78"/></text:p>
          </table:table-cell>
        </table:table-row>
        <table:table-row table:style-name="表格104.1">
          <table:table-cell table:style-name="表格104.A3" office:value-type="string">
            <text:p text:style-name="P25" loext:marker-style-name="T78"><text:span text:style-name="T138">Multiple Access </text:span><text:span text:style-name="T77">多重存取</text:span></text:p>
          </table:table-cell>
          <table:table-cell table:style-name="表格104.A3" office:value-type="string">
            <text:p text:style-name="P25" loext:marker-style-name="T78"><text:span text:style-name="T77">大家共用同一個頻道</text:span><text:span text:style-name="T78"/></text:p>
          </table:table-cell>
        </table:table-row>
        <table:table-row table:style-name="表格104.1">
          <table:table-cell table:style-name="表格104.A2" office:value-type="string">
            <text:p text:style-name="P25" loext:marker-style-name="T78"><text:span text:style-name="T138">Collision Avoidance </text:span><text:span text:style-name="T77">碰撞避免</text:span></text:p>
          </table:table-cell>
          <table:table-cell table:style-name="表格104.A2" office:value-type="string">
            <text:p text:style-name="P25" loext:marker-style-name="T78"><text:span text:style-name="T77">盡量「避免」訊號互撞（而非偵測後再處理）</text:span><text:span text:style-name="T78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8"><text:span text:style-name="T176">📶 <text:s/></text:span><text:span text:style-name="T62">WiFi </text:span><text:span text:style-name="T54">高速基礎</text:span></text:p>
            <text:p text:style-name="P9" loext:marker-style-name="T101"><text:span text:style-name="T99">另：</text:span><text:span text:style-name="T148">OFDM</text:span><text:span text:style-name="T99">（正交分頻多工）— 將資料分成多個子頻道同時傳輸，讓頻寬利用率大幅提升，是現代 </text:span><text:span text:style-name="T148">WiFi </text:span><text:span text:style-name="T99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8"><text:span text:style-name="T176">🚑 <text:s/></text:span><text:span text:style-name="T190">WiFi </text:span><text:span text:style-name="T180">的 </text:span><text:span text:style-name="T190">QoS</text:span><text:span text:style-name="T180">：</text:span><text:span text:style-name="T190">EDCA</text:span></text:p>
            <text:p text:style-name="P9" loext:marker-style-name="T101"><text:span text:style-name="T99">當很多人在搶頻道，某些資料（語音、視訊）需要優先通過，這就是 </text:span><text:span text:style-name="T148">EDCA</text:span><text:span text:style-name="T99">（</text:span><text:span text:style-name="T148">Enhanced Distributed Channel Access</text:span><text:span text:style-name="T99">）的功能。視訊通話</text:span><text:span text:style-name="T148">/</text:span><text:span text:style-name="T99">語音→少等、優先傳；網頁</text:span><text:span text:style-name="T148">/</text:span><text:span text:style-name="T99">大檔下載→稍微等一下也沒關係。</text:span></text:p>
            <text:p text:style-name="P10" loext:marker-style-name="T101"><text:span text:style-name="T99">記憶口訣：</text:span><text:span text:style-name="T148">WiFi = </text:span><text:span text:style-name="T99">急診室排隊制度（心臟病</text:span><text:span text:style-name="T148">/</text:span><text:span text:style-name="T99">語音視訊優先，小感冒</text:span><text:span text:style-name="T148">/</text:span><text:span text:style-name="T99">網頁下載等一下）。</text:span></text:p>
          </table:table-cell>
          <table:covered-table-cell/>
        </table:table-row>
      </table:table>
      <text:h text:style-name="P2" text:outline-level="2" loext:marker-style-name="T27"><text:span text:style-name="T28">二、</text:span><text:span text:style-name="T27">Bluetooth</text:span><text:span text:style-name="T28">：老大排班（</text:span><text:span text:style-name="T27">Master-Slave</text:span><text:span text:style-name="T28">）</text:span></text:h>
      <text:p text:style-name="P32" loext:marker-style-name="T101"><text:span text:style-name="T148">Bluetooth </text:span><text:span text:style-name="T99">不靠「搶」，而是由 </text:span><text:span text:style-name="T148">Master </text:span><text:span text:style-name="T99">統一分配時間，</text:span><text:span text:style-name="T148">Slave </text:span><text:span text:style-name="T99">照順序傳資料（</text:span><text:span text:style-name="T148">0~1ms </text:span><text:span text:style-name="T99">耳機、</text:span><text:span text:style-name="T148">1~2ms </text:span><text:span text:style-name="T99">滑鼠、</text:span><text:span text:style-name="T148">2~3ms </text:span><text:span text:style-name="T99">鍵盤、</text:span><text:span text:style-name="T148">3~4ms </text:span><text:span text:style-name="T99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8"><text:span text:style-name="T176">🔵 <text:s/></text:span><text:span text:style-name="T54">為什麼要排班？</text:span></text:p>
            <text:p text:style-name="P9" loext:marker-style-name="T101"><text:span text:style-name="T99">因為藍牙裝置大多是「即時設備」，延遲太久就沒用了（耳機你說「你好」</text:span><text:span text:style-name="T148">2 </text:span><text:span text:style-name="T99">秒後才到→完蛋；滑鼠 </text:span><text:span text:style-name="T148">1 </text:span><text:span text:style-name="T99">秒後游標才動→無法使用）。因此 </text:span><text:span text:style-name="T148">Bluetooth </text:span><text:span text:style-name="T99">保留固定時槽（</text:span><text:span text:style-name="T148">Time Slot</text:span><text:span text:style-name="T99">），確保即時性與穩定性。</text:span></text:p>
            <text:p text:style-name="P10" loext:marker-style-name="T101"><text:span text:style-name="T99">記憶口訣：</text:span><text:span text:style-name="T148">WiFi = </text:span><text:span text:style-name="T99">菜市場（自由競爭，亂搶）；</text:span><text:span text:style-name="T148">Bluetooth = </text:span><text:span text:style-name="T99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6" loext:marker-style-name="T65"><text:span text:style-name="T64">即時語音</text:span><text:span text:style-name="T65"/></text:p>
          </table:table-cell>
          <table:table-cell table:style-name="表格105.A2" office:value-type="string">
            <text:p text:style-name="P6" loext:marker-style-name="T65"><text:span text:style-name="T64">全名</text:span><text:span text:style-name="T65"/></text:p>
          </table:table-cell>
          <table:table-cell table:style-name="表格105.A2" office:value-type="string">
            <text:p text:style-name="P6" loext:marker-style-name="T65"><text:span text:style-name="T64">說明</text:span><text:span text:style-name="T65"/></text:p>
          </table:table-cell>
          <table:table-cell table:style-name="表格105.A2" office:value-type="string">
            <text:p text:style-name="P6" loext:marker-style-name="T65"><text:span text:style-name="T64">用途</text:span><text:span text:style-name="T65"/></text:p>
          </table:table-cell>
        </table:table-row>
        <table:table-row table:style-name="表格105.1">
          <table:table-cell table:style-name="表格105.A3" office:value-type="string">
            <text:p text:style-name="P25" loext:marker-style-name="T78"><text:span text:style-name="T138">SCO</text:span><text:span text:style-name="T78"/></text:p>
          </table:table-cell>
          <table:table-cell table:style-name="表格105.A3" office:value-type="string">
            <text:p text:style-name="P25" loext:marker-style-name="T78"><text:span text:style-name="T138">Synchronous Connection-Oriented</text:span><text:span text:style-name="T78"/></text:p>
          </table:table-cell>
          <table:table-cell table:style-name="表格105.A3" office:value-type="string">
            <text:p text:style-name="P25" loext:marker-style-name="T78"><text:span text:style-name="T77">固定時槽、同步傳輸</text:span><text:span text:style-name="T78"/></text:p>
          </table:table-cell>
          <table:table-cell table:style-name="表格105.A3" office:value-type="string">
            <text:p text:style-name="P25" loext:marker-style-name="T78"><text:span text:style-name="T77">藍牙耳機通話</text:span><text:span text:style-name="T78"/></text:p>
          </table:table-cell>
        </table:table-row>
        <table:table-row table:style-name="表格105.1">
          <table:table-cell table:style-name="表格105.A4" office:value-type="string">
            <text:p text:style-name="P25" loext:marker-style-name="T78"><text:span text:style-name="T138">eSCO</text:span><text:span text:style-name="T78"/></text:p>
          </table:table-cell>
          <table:table-cell table:style-name="表格105.A4" office:value-type="string">
            <text:p text:style-name="P25" loext:marker-style-name="T78"><text:span text:style-name="T138">Enhanced SCO</text:span><text:span text:style-name="T78"/></text:p>
          </table:table-cell>
          <table:table-cell table:style-name="表格105.A4" office:value-type="string">
            <text:p text:style-name="P25" loext:marker-style-name="T78"><text:span text:style-name="T138">SCO </text:span><text:span text:style-name="T77">加強版、可重傳、品質更好</text:span></text:p>
          </table:table-cell>
          <table:table-cell table:style-name="表格105.A4" office:value-type="string">
            <text:p text:style-name="P25" loext:marker-style-name="T78"><text:span text:style-name="T77">高品質語音</text:span><text:span text:style-name="T78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8"><text:span text:style-name="T176">🔀 <text:s/></text:span><text:span text:style-name="T62">Bluetooth </text:span><text:span text:style-name="T54">抗干擾</text:span></text:p>
            <text:p text:style-name="P9" loext:marker-style-name="T101"><text:span text:style-name="T99">另：</text:span><text:span text:style-name="T148">FHSS</text:span><text:span text:style-name="T99">（跳頻展頻）— 在 </text:span><text:span text:style-name="T148">2.4GHz </text:span><text:span text:style-name="T99">頻段中每秒快速切換數百次（每秒約 </text:span><text:span text:style-name="T148">1600 </text:span><text:span text:style-name="T99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28">三、深入理解：時槽（</text:span><text:span text:style-name="T27">Time Slot</text:span><text:span text:style-name="T28">）</text:span></text:h>
      <text:p text:style-name="P32" loext:marker-style-name="T101"><text:span text:style-name="T99">時槽就是「切好的時間格子」。藍牙頻道像一條只有一個人能講話的走廊，如果大家同時講會混在一起亂掉。</text:span><text:span text:style-name="T148">Bluetooth </text:span><text:span text:style-name="T99">的解法：把時間先切成固定小格子，每個格子叫 </text:span><text:span text:style-name="T148">Time Slot</text:span><text:span text:style-name="T99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6" loext:marker-style-name="T71"><text:span text:style-name="T70">三大好處</text:span><text:span text:style-name="T71"/></text:p>
            </table:table-cell>
            <table:table-cell table:style-name="表格106.A1" table:number-columns-spanned="2" office:value-type="string">
              <text:p text:style-name="P6" loext:marker-style-name="T71"><text:span text:style-name="T70">說明</text:span><text:span text:style-name="T71"/></text:p>
            </table:table-cell>
            <table:covered-table-cell/>
            <table:table-cell table:style-name="表格106.A1" office:value-type="string">
              <text:p text:style-name="P6" loext:marker-style-name="T71"><text:span text:style-name="T70">比喻</text:span><text:span text:style-name="T71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 loext:marker-style-name="T129"><text:span text:style-name="T130">穩定不碰撞</text:span><text:span text:style-name="T129"/></text:p>
          </table:table-cell>
          <table:table-cell table:style-name="表格106.A2" table:number-columns-spanned="2" office:value-type="string">
            <text:p text:style-name="P25" loext:marker-style-name="T129"><text:span text:style-name="T130">每人有專屬時間，不會互相干擾</text:span><text:span text:style-name="T129"/></text:p>
          </table:table-cell>
          <table:covered-table-cell/>
          <table:table-cell table:style-name="表格106.A2" office:value-type="string">
            <text:p text:style-name="P25" loext:marker-style-name="T129"><text:span text:style-name="T130">公司會議室預約制</text:span><text:span text:style-name="T129"/></text:p>
          </table:table-cell>
        </table:table-row>
        <table:table-row table:style-name="表格106.1">
          <table:table-cell table:style-name="表格106.A3" office:value-type="string">
            <text:p text:style-name="P25" loext:marker-style-name="T129"><text:span text:style-name="T130">即時性保證</text:span><text:span text:style-name="T129"/></text:p>
          </table:table-cell>
          <table:table-cell table:style-name="表格106.A3" table:number-columns-spanned="2" office:value-type="string">
            <text:p text:style-name="P25" loext:marker-style-name="T129"><text:span text:style-name="T130">耳機每隔固定時間必定輪到，聲音不卡頓</text:span><text:span text:style-name="T129"/></text:p>
          </table:table-cell>
          <table:covered-table-cell/>
          <table:table-cell table:style-name="表格106.A3" office:value-type="string">
            <text:p text:style-name="P25" loext:marker-style-name="T129"><text:span text:style-name="T130">醫院預約制，準時看診</text:span><text:span text:style-name="T129"/></text:p>
          </table:table-cell>
        </table:table-row>
        <table:table-row table:style-name="表格106.1">
          <table:table-cell table:style-name="表格106.A2" office:value-type="string">
            <text:p text:style-name="P25" loext:marker-style-name="T129"><text:span text:style-name="T130">省電效果</text:span><text:span text:style-name="T129"/></text:p>
          </table:table-cell>
          <table:table-cell table:style-name="表格106.A2" table:number-columns-spanned="2" office:value-type="string">
            <text:p text:style-name="P25" loext:marker-style-name="T129"><text:span text:style-name="T130">裝置知道「還沒輪到我」，可先休眠等待</text:span><text:span text:style-name="T129"/></text:p>
          </table:table-cell>
          <table:covered-table-cell/>
          <table:table-cell table:style-name="表格106.A2" office:value-type="string">
            <text:p text:style-name="P25" loext:marker-style-name="T129"><text:span text:style-name="T130">等候室等叫號，先睡一下</text:span><text:span text:style-name="T129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2" loext:marker-style-name="T65"><text:span text:style-name="T74">WiFi </text:span><text:span text:style-name="T64">競爭制</text:span></text:p>
          </table:table-cell>
          <table:covered-table-cell/>
          <table:table-cell table:style-name="表格106.A1" table:number-columns-spanned="2" office:value-type="string">
            <text:p text:style-name="P22" loext:marker-style-name="T65"><text:span text:style-name="T74">BT </text:span><text:span text:style-name="T64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5" loext:marker-style-name="T78"><text:span text:style-name="T77">菜市場：大家自由搶。吞吐量高、速度快，但可能塞車、延遲不穩定。</text:span><text:span text:style-name="T78"/></text:p>
          </table:table-cell>
          <table:covered-table-cell/>
          <table:table-cell table:style-name="表格106.A2" table:number-columns-spanned="2" office:value-type="string">
            <text:p text:style-name="P25" loext:marker-style-name="T78"><text:span text:style-name="T77">醫院預約制：輪流看診。延遲固定、穩定省電，但速度不如 </text:span><text:span text:style-name="T138">WiFi </text:span><text:span text:style-name="T77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8"><text:span text:style-name="T176">🕐 <text:s/></text:span><text:span text:style-name="T226">考試定義（背起來）</text:span></text:p>
            <text:p text:style-name="P9" loext:marker-style-name="T101"><text:span text:style-name="T148">Time Slot</text:span><text:span text:style-name="T99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6" loext:marker-style-name="T65"><text:span text:style-name="T64">項目</text:span><text:span text:style-name="T65"/></text:p>
            </table:table-cell>
            <table:table-cell table:style-name="表格107.A1" office:value-type="string">
              <text:p text:style-name="P6" loext:marker-style-name="T65"><text:span text:style-name="T74">WiFi</text:span><text:span text:style-name="T65"/></text:p>
            </table:table-cell>
            <table:table-cell table:style-name="表格107.A1" office:value-type="string">
              <text:p text:style-name="P6" loext:marker-style-name="T65"><text:span text:style-name="T74">Bluetooth</text:span><text:span text:style-name="T65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 loext:marker-style-name="T78"><text:span text:style-name="T77">核心機制</text:span><text:span text:style-name="T78"/></text:p>
          </table:table-cell>
          <table:table-cell table:style-name="表格107.A2" office:value-type="string">
            <text:p text:style-name="P25" loext:marker-style-name="T78"><text:span text:style-name="T138">CSMA/CA</text:span><text:span text:style-name="T77">（先偵聽再傳）</text:span></text:p>
          </table:table-cell>
          <table:table-cell table:style-name="表格107.A2" office:value-type="string">
            <text:p text:style-name="P25" loext:marker-style-name="T78"><text:span text:style-name="T138">Master-Slave</text:span><text:span text:style-name="T77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78"><text:span text:style-name="T77">即時語音 </text:span><text:span text:style-name="T138">/ QoS</text:span></text:p>
          </table:table-cell>
          <table:table-cell table:style-name="表格107.A3" office:value-type="string">
            <text:p text:style-name="P25" loext:marker-style-name="T78"><text:span text:style-name="T138">EDCA</text:span><text:span text:style-name="T77">（</text:span><text:span text:style-name="T138">QoS </text:span><text:span text:style-name="T77">優先）</text:span></text:p>
          </table:table-cell>
          <table:table-cell table:style-name="表格107.A3" office:value-type="string">
            <text:p text:style-name="P25" loext:marker-style-name="T78"><text:span text:style-name="T138">SCO / eSCO</text:span><text:span text:style-name="T77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78"><text:span text:style-name="T77">速度</text:span><text:span text:style-name="T78"/></text:p>
          </table:table-cell>
          <table:table-cell table:style-name="表格107.A2" office:value-type="string">
            <text:p text:style-name="P25" loext:marker-style-name="T78"><text:span text:style-name="T77">高速（快）</text:span><text:span text:style-name="T78"/></text:p>
          </table:table-cell>
          <table:table-cell table:style-name="表格107.A2" office:value-type="string">
            <text:p text:style-name="P25" loext:marker-style-name="T78"><text:span text:style-name="T77">較慢</text:span><text:span text:style-name="T78"/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78"><text:span text:style-name="T77">耗電量</text:span><text:span text:style-name="T78"/></text:p>
          </table:table-cell>
          <table:table-cell table:style-name="表格107.A3" office:value-type="string">
            <text:p text:style-name="P25" loext:marker-style-name="T78"><text:span text:style-name="T77">較高</text:span><text:span text:style-name="T78"/></text:p>
          </table:table-cell>
          <table:table-cell table:style-name="表格107.A3" office:value-type="string">
            <text:p text:style-name="P25" loext:marker-style-name="T78"><text:span text:style-name="T77">低功耗</text:span><text:span text:style-name="T78"/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78"><text:span text:style-name="T77">傳輸距離</text:span><text:span text:style-name="T78"/></text:p>
          </table:table-cell>
          <table:table-cell table:style-name="表格107.A2" office:value-type="string">
            <text:p text:style-name="P25" loext:marker-style-name="T78"><text:span text:style-name="T77">較遠（數十</text:span><text:span text:style-name="T138">~</text:span><text:span text:style-name="T77">百公尺）</text:span></text:p>
          </table:table-cell>
          <table:table-cell table:style-name="表格107.A2" office:value-type="string">
            <text:p text:style-name="P25" loext:marker-style-name="T78"><text:span text:style-name="T77">較短（約 </text:span><text:span text:style-name="T138">10 </text:span><text:span text:style-name="T77">公尺）</text:span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78"><text:span text:style-name="T77">穩定性</text:span><text:span text:style-name="T78"/></text:p>
          </table:table-cell>
          <table:table-cell table:style-name="表格107.A3" office:value-type="string">
            <text:p text:style-name="P25" loext:marker-style-name="T78"><text:span text:style-name="T77">受干擾影響較大</text:span><text:span text:style-name="T78"/></text:p>
          </table:table-cell>
          <table:table-cell table:style-name="表格107.A3" office:value-type="string">
            <text:p text:style-name="P25" loext:marker-style-name="T78"><text:span text:style-name="T77">固定時槽非常穩定</text:span><text:span text:style-name="T78"/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78"><text:span text:style-name="T77">適用場景</text:span><text:span text:style-name="T78"/></text:p>
          </table:table-cell>
          <table:table-cell table:style-name="表格107.A2" office:value-type="string">
            <text:p text:style-name="P25" loext:marker-style-name="T78"><text:span text:style-name="T77">上網、看影片、大檔下載</text:span><text:span text:style-name="T78"/></text:p>
          </table:table-cell>
          <table:table-cell table:style-name="表格107.A2" office:value-type="string">
            <text:p text:style-name="P25" loext:marker-style-name="T78"><text:span text:style-name="T77">耳機、滑鼠、鍵盤、通話</text:span><text:span text:style-name="T78"/></text:p>
          </table:table-cell>
        </table:table-row>
      </table:table>
      <text:h text:style-name="P2" text:outline-level="2" loext:marker-style-name="T27"><text:span text:style-name="T28">五、</text:span><text:span text:style-name="T27">L2CAP</text:span><text:span text:style-name="T28">：藍牙的資料管理員</text:span></text:h>
      <text:p text:style-name="P32" loext:marker-style-name="T101"><text:span text:style-name="T148">L2CAP</text:span><text:span text:style-name="T99">（</text:span><text:span text:style-name="T148">Logical Link Control and Adaptation Protocol</text:span><text:span text:style-name="T99">）是藍牙協議的重要一層，負責：管理並分流不同類型的資料（語音、檔案、控制指令）；建立、管理、釋放「邏輯通道」；提供 </text:span><text:span text:style-name="T148">QoS </text:span><text:span text:style-name="T99">服務品質保證。一句話記憶：</text:span><text:span text:style-name="T148">L2CAP </text:span><text:span text:style-name="T99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6" loext:marker-style-name="T71"><text:span text:style-name="T70">三種邏輯通道</text:span><text:span text:style-name="T71"/></text:p>
            </table:table-cell>
            <table:table-cell table:style-name="表格108.A1" table:number-columns-spanned="2" office:value-type="string">
              <text:p text:style-name="P6" loext:marker-style-name="T71"><text:span text:style-name="T70">特性</text:span><text:span text:style-name="T71"/></text:p>
            </table:table-cell>
            <table:covered-table-cell/>
            <table:table-cell table:style-name="表格108.A1" office:value-type="string">
              <text:p text:style-name="P6" loext:marker-style-name="T71"><text:span text:style-name="T70">用途</text:span><text:span text:style-name="T71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5" loext:marker-style-name="T129"><text:span text:style-name="T170">Connection-oriented</text:span><text:span text:style-name="T130">（連線導向）</text:span></text:p>
          </table:table-cell>
          <table:table-cell table:style-name="表格108.A2" table:number-columns-spanned="2" office:value-type="string">
            <text:p text:style-name="P25" loext:marker-style-name="T129"><text:span text:style-name="T130">有建立連線、雙方確認，可靠、確保收到</text:span><text:span text:style-name="T129"/></text:p>
          </table:table-cell>
          <table:covered-table-cell/>
          <table:table-cell table:style-name="表格108.A2" office:value-type="string">
            <text:p text:style-name="P25" loext:marker-style-name="T129"><text:span text:style-name="T130">重要資料傳輸、檔案（像打電話）</text:span><text:span text:style-name="T129"/></text:p>
          </table:table-cell>
        </table:table-row>
        <table:table-row table:style-name="表格108.1">
          <table:table-cell table:style-name="表格108.A3" office:value-type="string">
            <text:p text:style-name="P25" loext:marker-style-name="T129"><text:span text:style-name="T170">Connectionless</text:span><text:span text:style-name="T130">（非連線）</text:span></text:p>
          </table:table-cell>
          <table:table-cell table:style-name="表格108.A3" table:number-columns-spanned="2" office:value-type="string">
            <text:p text:style-name="P25" loext:marker-style-name="T129"><text:span text:style-name="T130">直接送出、不確認，快速但可能遺失</text:span><text:span text:style-name="T129"/></text:p>
          </table:table-cell>
          <table:covered-table-cell/>
          <table:table-cell table:style-name="表格108.A3" office:value-type="string">
            <text:p text:style-name="P25" loext:marker-style-name="T129"><text:span text:style-name="T130">廣播、串流（像廣播）</text:span><text:span text:style-name="T129"/></text:p>
          </table:table-cell>
        </table:table-row>
        <table:table-row table:style-name="表格108.1">
          <table:table-cell table:style-name="表格108.A2" office:value-type="string">
            <text:p text:style-name="P25" loext:marker-style-name="T129"><text:span text:style-name="T170">Signaling Channel</text:span><text:span text:style-name="T130">（信令通道）</text:span></text:p>
          </table:table-cell>
          <table:table-cell table:style-name="表格108.A2" table:number-columns-spanned="2" office:value-type="string">
            <text:p text:style-name="P25" loext:marker-style-name="T129"><text:span text:style-name="T130">控制管理用，不傳資料只管控制</text:span><text:span text:style-name="T129"/></text:p>
          </table:table-cell>
          <table:covered-table-cell/>
          <table:table-cell table:style-name="表格108.A2" office:value-type="string">
            <text:p text:style-name="P25" loext:marker-style-name="T129"><text:span text:style-name="T130">建立</text:span><text:span text:style-name="T170">/</text:span><text:span text:style-name="T130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6" loext:marker-style-name="T65"><text:span text:style-name="T74">OSI </text:span><text:span text:style-name="T64">層</text:span></text:p>
          </table:table-cell>
          <table:covered-table-cell/>
          <table:table-cell table:style-name="表格108.A1" table:number-columns-spanned="2" office:value-type="string">
            <text:p text:style-name="P6" loext:marker-style-name="T65"><text:span text:style-name="T64">藍牙對應</text:span><text:span text:style-name="T65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5" loext:marker-style-name="T78"><text:span text:style-name="T77">應用層 </text:span><text:span text:style-name="T138">Application</text:span></text:p>
          </table:table-cell>
          <table:covered-table-cell/>
          <table:table-cell table:style-name="表格108.A2" table:number-columns-spanned="2" office:value-type="string">
            <text:p text:style-name="P25" loext:marker-style-name="T78"><text:span text:style-name="T138">App / </text:span><text:span text:style-name="T77">語音 </text:span><text:span text:style-name="T138">/ </text:span><text:span text:style-name="T77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5" loext:marker-style-name="T78"><text:span text:style-name="T77">傳輸層 </text:span><text:span text:style-name="T138">Transport</text:span></text:p>
          </table:table-cell>
          <table:covered-table-cell/>
          <table:table-cell table:style-name="表格108.A3" table:number-columns-spanned="2" office:value-type="string">
            <text:p text:style-name="P25" loext:marker-style-name="T78"><text:span text:style-name="T77">部分功能在 </text:span><text:span text:style-name="T138">L2CAP</text:span><text:span text:style-name="T77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5" loext:marker-style-name="T78"><text:span text:style-name="T77">網路層 </text:span><text:span text:style-name="T138">Network</text:span></text:p>
          </table:table-cell>
          <table:covered-table-cell/>
          <table:table-cell table:style-name="表格108.A2" table:number-columns-spanned="2" office:value-type="string">
            <text:p text:style-name="P25" loext:marker-style-name="T78"><text:span text:style-name="T77">（幾乎不對應，藍牙無路由概念）</text:span><text:span text:style-name="T78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5" loext:marker-style-name="T78"><text:span text:style-name="T77">資料鏈結層 </text:span><text:span text:style-name="T138">Data Link</text:span></text:p>
          </table:table-cell>
          <table:covered-table-cell/>
          <table:table-cell table:style-name="表格108.A3" table:number-columns-spanned="2" office:value-type="string">
            <text:p text:style-name="P25" loext:marker-style-name="T78"><text:span text:style-name="T138">L2CAP / MAC </text:span><text:span text:style-name="T77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5" loext:marker-style-name="T78"><text:span text:style-name="T77">實體層 </text:span><text:span text:style-name="T138">Physical</text:span></text:p>
          </table:table-cell>
          <table:covered-table-cell/>
          <table:table-cell table:style-name="表格108.A2" table:number-columns-spanned="2" office:value-type="string">
            <text:p text:style-name="P25" loext:marker-style-name="T78"><text:span text:style-name="T77">無線電波（</text:span><text:span text:style-name="T138">2.4GHz</text:span><text:span text:style-name="T77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8"><text:span text:style-name="T176">📐 <text:s/></text:span><text:span text:style-name="T198">重要</text:span></text:p>
            <text:p text:style-name="P9" loext:marker-style-name="T101"><text:span text:style-name="T148">L2CAP </text:span><text:span text:style-name="T99">主要位於「資料鏈結層（</text:span><text:span text:style-name="T148">Data Link Layer</text:span><text:span text:style-name="T99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2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9"><text:span text:style-name="T157">WiFi </text:span><text:span text:style-name="T114">用什麼避免碰撞？　</text:span><text:span text:style-name="T99">✗ </text:span><text:span text:style-name="T148">CSMA/CD</text:span><text:span text:style-name="T99">（有線乙太網路機制）→ ✓ </text:span><text:span text:style-name="T148">CSMA/CA</text:span><text:span text:style-name="T99">（</text:span><text:span text:style-name="T148">WiFi </text:span><text:span text:style-name="T99">用「避免」碰撞，不是「偵測」）。口訣：有線 </text:span><text:span text:style-name="T148">Ethernet = CD</text:span><text:span text:style-name="T99">（</text:span><text:span text:style-name="T148">Detect</text:span><text:span text:style-name="T99">），無線 </text:span><text:span text:style-name="T148">WiFi = CA</text:span><text:span text:style-name="T99">（</text:span><text:span text:style-name="T148">Avoid</text:span><text:span text:style-name="T99">）。</text:span></text:p>
            <text:p text:style-name="P10"><text:span text:style-name="T157">Bluetooth </text:span><text:span text:style-name="T114">是競爭制還是排程制？　</text:span><text:span text:style-name="T99">✓ 排程制（</text:span><text:span text:style-name="T148">Master-Slave</text:span><text:span text:style-name="T99">，老大安排時槽），不是競爭制。</text:span></text:p>
            <text:p text:style-name="P10"><text:span text:style-name="T114">藍牙即時語音用什麼？　</text:span><text:span text:style-name="T99">✓ </text:span><text:span text:style-name="T148">SCO</text:span><text:span text:style-name="T99">（同步連線）或 </text:span><text:span text:style-name="T148">eSCO</text:span><text:span text:style-name="T99">（加強版，可重傳）。</text:span></text:p>
            <text:p text:style-name="P10"><text:span text:style-name="T157">L2CAP </text:span><text:span text:style-name="T114">控制管理用哪個通道？　</text:span><text:span text:style-name="T99">✓ </text:span><text:span text:style-name="T148">Signaling Channel</text:span><text:span text:style-name="T99">；最可靠＝</text:span><text:span text:style-name="T148">Connection-oriented</text:span><text:span text:style-name="T99">；最快速低延遲＝</text:span><text:span text:style-name="T148">Connectionless</text:span><text:span text:style-name="T99">。</text:span></text:p>
          </table:table-cell>
        </table:table-row>
        <table:table-row table:style-name="表格109.1">
          <table:table-cell table:style-name="表格109.A2" office:value-type="string">
            <text:p text:style-name="P8"><text:span text:style-name="T176">⏱ <text:s/></text:span><text:span text:style-name="T226">考前 </text:span><text:span text:style-name="T232">30 </text:span><text:span text:style-name="T226">秒濃縮</text:span></text:p>
            <text:p text:style-name="P9" loext:marker-style-name="T101"><text:span text:style-name="T148">WiFi</text:span><text:span text:style-name="T99">＝搶頻道 </text:span><text:span text:style-name="T148">· BT</text:span><text:span text:style-name="T99">＝排班 </text:span><text:span text:style-name="T148">· </text:span><text:span text:style-name="T99">時槽＝時間格子 </text:span><text:span text:style-name="T148">· SCO</text:span><text:span text:style-name="T99">＝語音 </text:span><text:span text:style-name="T148">· L2CAP</text:span><text:span text:style-name="T99">＝三通道（位於 </text:span><text:span text:style-name="T148">Data Link </text:span><text:span text:style-name="T99">層）。</text:span></text:p>
          </table:table-cell>
        </table:table-row>
      </table:table>
      <text:h text:style-name="P13" text:outline-level="1" loext:marker-style-name="T67"><text:span text:style-name="T66">第 十 篇　資訊安全：設備防護 </text:span><text:span text:style-name="T67">· </text:span><text:span text:style-name="T66">攻防解析 </text:span><text:span text:style-name="T67">· </text:span><text:span text:style-name="T66">企業資安 </text:span><text:span text:style-name="T67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8"><text:span text:style-name="T176">🛡️ <text:s/></text:span><text:span text:style-name="T47">本篇地圖</text:span></text:p>
            <text:p text:style-name="P9" loext:marker-style-name="T101"><text:span text:style-name="T99">本篇是全書最大主題，分六大部分：① 防護設備（</text:span><text:span text:style-name="T148">FW/WAF/NGFW/DMZ/IOC/Proxy</text:span><text:span text:style-name="T99">）；② </text:span><text:span text:style-name="T148">SQL Injection </text:span><text:span text:style-name="T99">與 </text:span><text:span text:style-name="T148">Zero-Day </text:span><text:span text:style-name="T99">攻防；③ </text:span><text:span text:style-name="T148">Firewall/IDS/IPS/SNMP/ICMP</text:span><text:span text:style-name="T99">；④ 企業資安三階段；⑤ </text:span><text:span text:style-name="T148">EDR/MDR/MITRE ATT&amp;CK/</text:span><text:span text:style-name="T99">數位韌性；⑥ </text:span><text:span text:style-name="T148">Zero Trust </text:span><text:span text:style-name="T99">零信任。</text:span></text:p>
          </table:table-cell>
        </table:table-row>
      </table:table>
      <text:h text:style-name="P2" text:outline-level="2" loext:marker-style-name="T27"><text:span text:style-name="T28">壹、資安與網路設備：</text:span><text:span text:style-name="T27">FW · WAF · NGFW · DMZ · IOC · Proxy</text:span></text:h>
      <text:p text:style-name="P32" loext:marker-style-name="T101"><text:span text:style-name="T99">想像你家是一間公司：外面是危險的 </text:span><text:span text:style-name="T148">Internet</text:span><text:span text:style-name="T99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6" loext:marker-style-name="T65"><text:span text:style-name="T64">名詞</text:span><text:span text:style-name="T65"/></text:p>
            </table:table-cell>
            <table:table-cell table:style-name="表格111.A1" office:value-type="string">
              <text:p text:style-name="P6" loext:marker-style-name="T65"><text:span text:style-name="T64">一行說明</text:span><text:span text:style-name="T65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5" loext:marker-style-name="T78"><text:span text:style-name="T138">FW</text:span><text:span text:style-name="T78"/></text:p>
          </table:table-cell>
          <table:table-cell table:style-name="表格111.A2" office:value-type="string">
            <text:p text:style-name="P25" loext:marker-style-name="T78"><text:span text:style-name="T77">傳統防火牆，只看封包「外面」的 </text:span><text:span text:style-name="T138">IP</text:span><text:span text:style-name="T77">、</text:span><text:span text:style-name="T138">Port</text:span><text:span text:style-name="T77">、</text:span><text:span text:style-name="T138">Protocol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78"><text:span text:style-name="T138">WAF</text:span><text:span text:style-name="T78"/></text:p>
          </table:table-cell>
          <table:table-cell table:style-name="表格111.A3" office:value-type="string">
            <text:p text:style-name="P25" loext:marker-style-name="T78"><text:span text:style-name="T77">網站應用防火牆，會打開封包「裡面」，防 </text:span><text:span text:style-name="T138">SQL Injection</text:span><text:span text:style-name="T77">、</text:span><text:span text:style-name="T138">XSS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78"><text:span text:style-name="T138">NGFW</text:span><text:span text:style-name="T78"/></text:p>
          </table:table-cell>
          <table:table-cell table:style-name="表格111.A2" office:value-type="string">
            <text:p text:style-name="P25" loext:marker-style-name="T78"><text:span text:style-name="T77">次世代防火牆，比 </text:span><text:span text:style-name="T138">FW </text:span><text:span text:style-name="T77">更聰明，有 </text:span><text:span text:style-name="T138">DPI </text:span><text:span text:style-name="T77">深度檢查、</text:span><text:span text:style-name="T138">IPS</text:span><text:span text:style-name="T77">、</text:span><text:span text:style-name="T138">App </text:span><text:span text:style-name="T77">識別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78"><text:span text:style-name="T138">DMZ</text:span><text:span text:style-name="T78"/></text:p>
          </table:table-cell>
          <table:table-cell table:style-name="表格111.A3" office:value-type="string">
            <text:p text:style-name="P25" loext:marker-style-name="T78"><text:span text:style-name="T77">隔離區，把對外服務（</text:span><text:span text:style-name="T138">Web</text:span><text:span text:style-name="T77">、</text:span><text:span text:style-name="T138">Mail</text:span><text:span text:style-name="T77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78"><text:span text:style-name="T138">IOC</text:span><text:span text:style-name="T78"/></text:p>
          </table:table-cell>
          <table:table-cell table:style-name="表格111.A2" office:value-type="string">
            <text:p text:style-name="P25" loext:marker-style-name="T78"><text:span text:style-name="T77">入侵指標（攻擊事後證據）：</text:span><text:span text:style-name="T138">Domain</text:span><text:span text:style-name="T77">（網）、</text:span><text:span text:style-name="T138">Hash</text:span><text:span text:style-name="T77">（檔）、</text:span><text:span text:style-name="T138">IP</text:span><text:span text:style-name="T77">（連）、</text:span><text:span text:style-name="T138">C2</text:span><text:span text:style-name="T77">（控）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78"><text:span text:style-name="T138">Proxy</text:span><text:span text:style-name="T78"/></text:p>
          </table:table-cell>
          <table:table-cell table:style-name="表格111.A3" office:value-type="string">
            <text:p text:style-name="P25" loext:marker-style-name="T78"><text:span text:style-name="T77">正向代理，幫「使用者（</text:span><text:span text:style-name="T138">Client</text:span><text:span text:style-name="T77">）」隱藏 </text:span><text:span text:style-name="T138">IP</text:span><text:span text:style-name="T77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78"><text:span text:style-name="T138">Reverse Proxy</text:span><text:span text:style-name="T78"/></text:p>
          </table:table-cell>
          <table:table-cell table:style-name="表格111.A2" office:value-type="string">
            <text:p text:style-name="P25" loext:marker-style-name="T78"><text:span text:style-name="T77">反向代理，幫「伺服器（</text:span><text:span text:style-name="T138">Server</text:span><text:span text:style-name="T77">）」負載平衡、隱藏主機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防火牆 </text:span><text:span text:style-name="T179">Firewall</text:span><text:span text:style-name="T180">（</text:span><text:span text:style-name="T179">FW</text:span><text:span text:style-name="T180">）</text:span></text:h>
      <text:p text:style-name="P32" loext:marker-style-name="T101"><text:span text:style-name="T99">最基本的網路防護設備，像公司門口的警衛。只看封包的「外部資訊」：</text:span><text:span text:style-name="T148">IP </text:span><text:span text:style-name="T99">位址（來者是誰）、</text:span><text:span text:style-name="T148">Port</text:span><text:span text:style-name="T99">（從哪個門進來）、</text:span><text:span text:style-name="T148">Protocol</text:span><text:span text:style-name="T99">（什麼類型）。主要運作在 </text:span><text:span text:style-name="T148">L3</text:span><text:span text:style-name="T99">（網路層）與 </text:span><text:span text:style-name="T148">L4</text:span><text:span text:style-name="T99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8"><text:span text:style-name="T176">⚠️ <text:s/></text:span><text:span text:style-name="T198">缺點</text:span></text:p>
            <text:p text:style-name="P9" loext:marker-style-name="T101"><text:span text:style-name="T148">FW </text:span><text:span text:style-name="T99">只看外面，不看封包裡面的內容，無法防止應用層攻擊（如 </text:span><text:span text:style-name="T148">SQL Injection</text:span><text:span text:style-name="T99">）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網站應用防火牆 </text:span><text:span text:style-name="T179">WAF</text:span></text:h>
      <text:p text:style-name="P32" loext:marker-style-name="T101"><text:span text:style-name="T99">進階版防護，會「打開包包檢查內容」，專門防禦網站層面的攻擊：</text:span><text:span text:style-name="T148">SQL Injection</text:span><text:span text:style-name="T99">（注入惡意 </text:span><text:span text:style-name="T148">SQL </text:span><text:span text:style-name="T99">竊取資料庫）、</text:span><text:span text:style-name="T148">XSS</text:span><text:span text:style-name="T99">（插入惡意 </text:span><text:span text:style-name="T148">JavaScript</text:span><text:span text:style-name="T99">）、其他 </text:span><text:span text:style-name="T148">HTTP </text:span><text:span text:style-name="T99">層攻擊（</text:span><text:span text:style-name="T148">CSRF</text:span><text:span text:style-name="T99">、</text:span><text:span text:style-name="T148">Path Traversal</text:span><text:span text:style-name="T99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6" loext:marker-style-name="T65"><text:span text:style-name="T64">比較項目</text:span><text:span text:style-name="T65"/></text:p>
            </table:table-cell>
            <table:table-cell table:style-name="表格113.A1" office:value-type="string">
              <text:p text:style-name="P6" loext:marker-style-name="T65"><text:span text:style-name="T74">FW</text:span><text:span text:style-name="T65"/></text:p>
            </table:table-cell>
            <table:table-cell table:style-name="表格113.A1" office:value-type="string">
              <text:p text:style-name="P6" loext:marker-style-name="T65"><text:span text:style-name="T74">WAF</text:span><text:span text:style-name="T65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5" loext:marker-style-name="T78"><text:span text:style-name="T77">檢查範圍</text:span><text:span text:style-name="T78"/></text:p>
          </table:table-cell>
          <table:table-cell table:style-name="表格113.A2" office:value-type="string">
            <text:p text:style-name="P25" loext:marker-style-name="T78"><text:span text:style-name="T77">封包外面（</text:span><text:span text:style-name="T138">IP/Port</text:span><text:span text:style-name="T77">）</text:span></text:p>
          </table:table-cell>
          <table:table-cell table:style-name="表格113.A2" office:value-type="string">
            <text:p text:style-name="P25" loext:marker-style-name="T78"><text:span text:style-name="T77">封包裡面（</text:span><text:span text:style-name="T138">HTTP </text:span><text:span text:style-name="T77">內容）</text:span></text:p>
          </table:table-cell>
        </table:table-row>
        <table:table-row table:style-name="表格113.1">
          <table:table-cell table:style-name="表格113.A3" office:value-type="string">
            <text:p text:style-name="P25" loext:marker-style-name="T78"><text:span text:style-name="T138">OSI </text:span><text:span text:style-name="T77">分層</text:span></text:p>
          </table:table-cell>
          <table:table-cell table:style-name="表格113.A3" office:value-type="string">
            <text:p text:style-name="P25" loext:marker-style-name="T78"><text:span text:style-name="T138">L3 / L4</text:span><text:span text:style-name="T78"/></text:p>
          </table:table-cell>
          <table:table-cell table:style-name="表格113.A3" office:value-type="string">
            <text:p text:style-name="P25" loext:marker-style-name="T78"><text:span text:style-name="T138">L7</text:span><text:span text:style-name="T77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5" loext:marker-style-name="T78"><text:span text:style-name="T77">防禦 </text:span><text:span text:style-name="T138">SQL Injection</text:span></text:p>
          </table:table-cell>
          <table:table-cell table:style-name="表格113.A2" office:value-type="string">
            <text:p text:style-name="P25" loext:marker-style-name="T78"><text:span text:style-name="T138">✗ </text:span><text:span text:style-name="T77">無法</text:span></text:p>
          </table:table-cell>
          <table:table-cell table:style-name="表格113.A2" office:value-type="string">
            <text:p text:style-name="P25" loext:marker-style-name="T78"><text:span text:style-name="T138">○ </text:span><text:span text:style-name="T77">可以</text:span></text:p>
          </table:table-cell>
        </table:table-row>
        <table:table-row table:style-name="表格113.1">
          <table:table-cell table:style-name="表格113.A3" office:value-type="string">
            <text:p text:style-name="P25" loext:marker-style-name="T78"><text:span text:style-name="T77">防禦 </text:span><text:span text:style-name="T138">XSS</text:span></text:p>
          </table:table-cell>
          <table:table-cell table:style-name="表格113.A3" office:value-type="string">
            <text:p text:style-name="P25" loext:marker-style-name="T78"><text:span text:style-name="T138">✗ </text:span><text:span text:style-name="T77">無法</text:span></text:p>
          </table:table-cell>
          <table:table-cell table:style-name="表格113.A3" office:value-type="string">
            <text:p text:style-name="P25" loext:marker-style-name="T78"><text:span text:style-name="T138">○ </text:span><text:span text:style-name="T77">可以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次世代防火牆 </text:span><text:span text:style-name="T179">NGFW</text:span></text:h>
      <text:p text:style-name="P32" loext:marker-style-name="T101"><text:span text:style-name="T99">在傳統 </text:span><text:span text:style-name="T148">FW </text:span><text:span text:style-name="T99">基礎上大幅強化：</text:span><text:span text:style-name="T148">DPI</text:span><text:span text:style-name="T99">（深度封包檢測）、</text:span><text:span text:style-name="T148">IPS</text:span><text:span text:style-name="T99">（入侵防禦）、</text:span><text:span text:style-name="T148">App </text:span><text:span text:style-name="T99">識別（知道你在用 </text:span><text:span text:style-name="T148">LINE </text:span><text:span text:style-name="T99">還是 </text:span><text:span text:style-name="T148">YouTube</text:span><text:span text:style-name="T99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22" loext:marker-style-name="T65"><text:span text:style-name="T64">能力</text:span><text:span text:style-name="T65"/></text:p>
            </table:table-cell>
            <table:table-cell table:style-name="表格114.A1" office:value-type="string">
              <text:p text:style-name="P22" loext:marker-style-name="T65"><text:span text:style-name="T74">FW</text:span><text:span text:style-name="T65"/></text:p>
            </table:table-cell>
            <table:table-cell table:style-name="表格114.A1" office:value-type="string">
              <text:p text:style-name="P22" loext:marker-style-name="T65"><text:span text:style-name="T74">WAF</text:span><text:span text:style-name="T65"/></text:p>
            </table:table-cell>
            <table:table-cell table:style-name="表格114.A1" office:value-type="string">
              <text:p text:style-name="P22" loext:marker-style-name="T65"><text:span text:style-name="T74">NGFW</text:span><text:span text:style-name="T65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5" loext:marker-style-name="T78"><text:span text:style-name="T138">IP/Port </text:span><text:span text:style-name="T77">過濾</text:span></text:p>
          </table:table-cell>
          <table:table-cell table:style-name="表格114.A2" office:value-type="string">
            <text:p text:style-name="P24" loext:marker-style-name="T216"><text:span text:style-name="T215">○</text:span><text:span text:style-name="T216"/></text:p>
          </table:table-cell>
          <table:table-cell table:style-name="表格114.A2" office:value-type="string">
            <text:p text:style-name="P24" loext:marker-style-name="T216"><text:span text:style-name="T215">○</text:span><text:span text:style-name="T216"/></text:p>
          </table:table-cell>
          <table:table-cell table:style-name="表格114.A2" office:value-type="string">
            <text:p text:style-name="P24" loext:marker-style-name="T216"><text:span text:style-name="T215">○</text:span><text:span text:style-name="T216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5" loext:marker-style-name="T78"><text:span text:style-name="T138">HTTP </text:span><text:span text:style-name="T77">內容檢查</text:span></text:p>
          </table:table-cell>
          <table:table-cell table:style-name="表格114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3" office:value-type="string">
            <text:p text:style-name="P24" loext:marker-style-name="T216"><text:span text:style-name="T215">○</text:span><text:span text:style-name="T216"/></text:p>
          </table:table-cell>
          <table:table-cell table:style-name="表格114.A3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114.1">
          <table:table-cell table:style-name="表格114.A2" office:value-type="string">
            <text:p text:style-name="P25" loext:marker-style-name="T78"><text:span text:style-name="T138">DPI </text:span><text:span text:style-name="T77">深度檢查</text:span></text:p>
          </table:table-cell>
          <table:table-cell table:style-name="表格114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2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114.1">
          <table:table-cell table:style-name="表格114.A3" office:value-type="string">
            <text:p text:style-name="P25" loext:marker-style-name="T78"><text:span text:style-name="T138">App </text:span><text:span text:style-name="T77">識別</text:span></text:p>
          </table:table-cell>
          <table:table-cell table:style-name="表格114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3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3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114.1">
          <table:table-cell table:style-name="表格114.A2" office:value-type="string">
            <text:p text:style-name="P25" loext:marker-style-name="T78"><text:span text:style-name="T138">IPS </text:span><text:span text:style-name="T77">入侵防禦</text:span></text:p>
          </table:table-cell>
          <table:table-cell table:style-name="表格114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2" office:value-type="string">
            <text:p text:style-name="P24" loext:marker-style-name="T207"><text:span text:style-name="T212">✗</text:span><text:span text:style-name="T207"/></text:p>
          </table:table-cell>
          <table:table-cell table:style-name="表格114.A2" office:value-type="string">
            <text:p text:style-name="P24" loext:marker-style-name="T216"><text:span text:style-name="T215">○</text:span><text:span text:style-name="T216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8"><text:span text:style-name="T176">💡 <text:s/></text:span><text:span text:style-name="T180">實務說明</text:span></text:p>
            <text:p text:style-name="P9" loext:marker-style-name="T101"><text:span text:style-name="T148">NGFW </text:span><text:span text:style-name="T99">在現代企業通常用來「取代」傳統 </text:span><text:span text:style-name="T148">FW</text:span><text:span text:style-name="T99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DMZ</text:span><text:span text:style-name="T180">（非軍事區 </text:span><text:span text:style-name="T179">/ </text:span><text:span text:style-name="T180">隔離區）</text:span></text:h>
      <text:p text:style-name="P32" loext:marker-style-name="T101"><text:span text:style-name="T99">網路架構中的「隔離緩衝區」，專門放置需要對外公開的服務。生活比喻：</text:span><text:span text:style-name="T148">DMZ</text:span><text:span text:style-name="T99">＝大樓門口的接待室，訪客只能到接待室、無法進入辦公室；就算接待室被搗亂，也不影響裡面的員工與機密。通常放：</text:span><text:span text:style-name="T148">Web Server</text:span><text:span text:style-name="T99">、</text:span><text:span text:style-name="T148">Mail Server</text:span><text:span text:style-name="T99">、</text:span><text:span text:style-name="T148">DNS Server</text:span><text:span text:style-name="T99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8"><text:span text:style-name="T176">⚠️ <text:s/></text:span><text:span text:style-name="T198">考試陷阱</text:span></text:p>
            <text:p text:style-name="P9" loext:marker-style-name="T101"><text:span text:style-name="T148">DMZ </text:span><text:span text:style-name="T99">的用途是「隔離保護」（就算 </text:span><text:span text:style-name="T148">DMZ </text:span><text:span text:style-name="T99">內伺服器被駭，駭客也無法直接進入內部網路），不是提升速度，也不是加密資料！</text:span></text:p>
          </table:table-cell>
        </table:table-row>
      </table:table>
      <text:h text:style-name="P3" text:outline-level="3"><text:span text:style-name="T178">▍</text:span><text:span text:style-name="T179"> IOC</text:span><text:span text:style-name="T180">（入侵指標）</text:span></text:h>
      <text:p text:style-name="P32" loext:marker-style-name="T101"><text:span text:style-name="T148">IOC</text:span><text:span text:style-name="T99">（</text:span><text:span text:style-name="T148">Indicator of Compromise</text:span><text:span text:style-name="T99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8"><text:span text:style-name="T176">🎯 <text:s/></text:span><text:span text:style-name="T226">核心觀念</text:span></text:p>
            <text:p text:style-name="P9" loext:marker-style-name="T101"><text:span text:style-name="T148">IOC </text:span><text:span text:style-name="T99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2" loext:marker-style-name="T71"><text:span text:style-name="T70">口訣</text:span><text:span text:style-name="T71"/></text:p>
          </table:table-cell>
          <table:table-cell table:style-name="表格116.A2" office:value-type="string">
            <text:p text:style-name="P22" loext:marker-style-name="T71"><text:span text:style-name="T76">IOC </text:span><text:span text:style-name="T70">類型</text:span></text:p>
          </table:table-cell>
          <table:table-cell table:style-name="表格116.A2" office:value-type="string">
            <text:p text:style-name="P22" loext:marker-style-name="T71"><text:span text:style-name="T70">白話說明</text:span><text:span text:style-name="T71"/></text:p>
          </table:table-cell>
          <table:table-cell table:style-name="表格116.A2" office:value-type="string">
            <text:p text:style-name="P22" loext:marker-style-name="T71"><text:span text:style-name="T70">對應防禦工具</text:span><text:span text:style-name="T71"/></text:p>
          </table:table-cell>
        </table:table-row>
        <table:table-row table:style-name="表格116.1">
          <table:table-cell table:style-name="表格116.A3" office:value-type="string">
            <text:p text:style-name="P24" loext:marker-style-name="T225"><text:span text:style-name="T224">網</text:span><text:span text:style-name="T225"/></text:p>
          </table:table-cell>
          <table:table-cell table:style-name="表格116.A3" office:value-type="string">
            <text:p text:style-name="P25" loext:marker-style-name="T129"><text:span text:style-name="T130">惡意 </text:span><text:span text:style-name="T170">Domain</text:span><text:span text:style-name="T130">（網域）</text:span></text:p>
          </table:table-cell>
          <table:table-cell table:style-name="表格116.A3" office:value-type="string">
            <text:p text:style-name="P25" loext:marker-style-name="T129"><text:span text:style-name="T130">釣魚網站網址，用來騙帳密、假冒正規網站</text:span><text:span text:style-name="T129"/></text:p>
          </table:table-cell>
          <table:table-cell table:style-name="表格116.A3" office:value-type="string">
            <text:p text:style-name="P25" loext:marker-style-name="T129"><text:span text:style-name="T170">DNS </text:span><text:span text:style-name="T130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24" loext:marker-style-name="T225"><text:span text:style-name="T224">檔</text:span><text:span text:style-name="T225"/></text:p>
          </table:table-cell>
          <table:table-cell table:style-name="表格116.A4" office:value-type="string">
            <text:p text:style-name="P25" loext:marker-style-name="T129"><text:span text:style-name="T130">惡意 </text:span><text:span text:style-name="T170">Hash</text:span><text:span text:style-name="T130">（雜湊值）</text:span></text:p>
          </table:table-cell>
          <table:table-cell table:style-name="表格116.A4" office:value-type="string">
            <text:p text:style-name="P25" loext:marker-style-name="T129"><text:span text:style-name="T130">惡意程式的唯一特徵碼，改檔名也能識別</text:span><text:span text:style-name="T129"/></text:p>
          </table:table-cell>
          <table:table-cell table:style-name="表格116.A4" office:value-type="string">
            <text:p text:style-name="P25" loext:marker-style-name="T129"><text:span text:style-name="T130">防毒軟體 </text:span><text:span text:style-name="T170">AV</text:span><text:span text:style-name="T130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24" loext:marker-style-name="T225"><text:span text:style-name="T224">連</text:span><text:span text:style-name="T225"/></text:p>
          </table:table-cell>
          <table:table-cell table:style-name="表格116.A3" office:value-type="string">
            <text:p text:style-name="P25" loext:marker-style-name="T129"><text:span text:style-name="T130">惡意 </text:span><text:span text:style-name="T170">IP </text:span><text:span text:style-name="T130">位址</text:span></text:p>
          </table:table-cell>
          <table:table-cell table:style-name="表格116.A3" office:value-type="string">
            <text:p text:style-name="P25" loext:marker-style-name="T129"><text:span text:style-name="T130">感染後電腦對外異常連線的目標</text:span><text:span text:style-name="T129"/></text:p>
          </table:table-cell>
          <table:table-cell table:style-name="表格116.A3" office:value-type="string">
            <text:p text:style-name="P25" loext:marker-style-name="T129"><text:span text:style-name="T130">防火牆 </text:span><text:span text:style-name="T170">FW / NGFW</text:span><text:span text:style-name="T130">（封鎖 </text:span><text:span text:style-name="T170">IP</text:span><text:span text:style-name="T130">）</text:span></text:p>
          </table:table-cell>
        </table:table-row>
        <table:table-row table:style-name="表格116.1">
          <table:table-cell table:style-name="表格116.A4" office:value-type="string">
            <text:p text:style-name="P24" loext:marker-style-name="T225"><text:span text:style-name="T224">控</text:span><text:span text:style-name="T225"/></text:p>
          </table:table-cell>
          <table:table-cell table:style-name="表格116.A4" office:value-type="string">
            <text:p text:style-name="P25" loext:marker-style-name="T129"><text:span text:style-name="T170">C2 Server</text:span><text:span text:style-name="T130">（指揮控制）</text:span></text:p>
          </table:table-cell>
          <table:table-cell table:style-name="表格116.A4" office:value-type="string">
            <text:p text:style-name="P25" loext:marker-style-name="T129"><text:span text:style-name="T130">駭客遠端操控被感染主機的總部</text:span><text:span text:style-name="T129"/></text:p>
          </table:table-cell>
          <table:table-cell table:style-name="表格116.A4" office:value-type="string">
            <text:p text:style-name="P25" loext:marker-style-name="T129"><text:span text:style-name="T170">SIEM / IDS</text:span><text:span text:style-name="T130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8"><text:span text:style-name="T176">▸ <text:s/></text:span><text:span text:style-name="T47">攻擊全流程（</text:span><text:span text:style-name="T58">IOC </text:span><text:span text:style-name="T47">出現在哪裡？）</text:span></text:p>
            <text:p text:style-name="P9" loext:marker-style-name="T101"><text:span text:style-name="T148">① </text:span><text:span text:style-name="T99">駭客準備：建立釣魚網站（</text:span><text:span text:style-name="T148">Domain</text:span><text:span text:style-name="T99">）、製作惡意程式（</text:span><text:span text:style-name="T148">Hash</text:span><text:span text:style-name="T99">）、架設控制中心（</text:span><text:span text:style-name="T148">C2</text:span><text:span text:style-name="T99">）→ ② 發動攻擊：受害者點釣魚網站 → 下載惡意程式 → ③ 主機感染：電腦自動連回駭客主機（</text:span><text:span text:style-name="T148">IP</text:span><text:span text:style-name="T99">）或 </text:span><text:span text:style-name="T148">C2 → ④ </text:span><text:span text:style-name="T99">駭客控制：下指令、偷資料、橫向移動 → ⑤ 資安系統偵測：比對異常 </text:span><text:span text:style-name="T148">IP</text:span><text:span text:style-name="T99">、惡意 </text:span><text:span text:style-name="T148">Domain</text:span><text:span text:style-name="T99">、已知 </text:span><text:span text:style-name="T148">Hash</text:span><text:span text:style-name="T99">、</text:span><text:span text:style-name="T148">C2 </text:span><text:span text:style-name="T99">行為 → ⑥ 判定中毒 → </text:span><text:span text:style-name="T148">IOC </text:span><text:span text:style-name="T99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8"><text:span text:style-name="T176">⚡ <text:s/></text:span><text:span text:style-name="T190">10 </text:span><text:span text:style-name="T180">秒口訣速記</text:span></text:p>
            <text:p text:style-name="P9" loext:marker-style-name="T101"><text:span text:style-name="T99">網騙你（</text:span><text:span text:style-name="T148">Domain</text:span><text:span text:style-name="T99">）→ 檔害你（</text:span><text:span text:style-name="T148">Hash</text:span><text:span text:style-name="T99">）→ 連出去（</text:span><text:span text:style-name="T148">IP</text:span><text:span text:style-name="T99">）→ 被控制（</text:span><text:span text:style-name="T148">C2</text:span><text:span text:style-name="T99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Proxy </text:span><text:span text:style-name="T180">與 </text:span><text:span text:style-name="T179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2" loext:marker-style-name="T65"><text:span text:style-name="T74">🧍 Proxy</text:span><text:span text:style-name="T64">（正向代理）— 幫 </text:span><text:span text:style-name="T74">Client</text:span></text:p>
            </table:table-cell>
            <table:table-cell table:style-name="表格117.A1" office:value-type="string">
              <text:p text:style-name="P22" loext:marker-style-name="T65"><text:span text:style-name="T74">🏢 Reverse Proxy</text:span><text:span text:style-name="T64">（反向代理）— 幫 </text:span><text:span text:style-name="T74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5" loext:marker-style-name="T78"><text:span text:style-name="T77">流程：你 → </text:span><text:span text:style-name="T138">Proxy → </text:span><text:span text:style-name="T77">網站。隱藏使用者真實 </text:span><text:span text:style-name="T138">IP</text:span><text:span text:style-name="T77">、</text:span><text:span text:style-name="T138">Cache </text:span><text:span text:style-name="T77">加速、企業控管員工能存取哪些網站。比</text:span><text:soft-page-break/><text:span text:style-name="T77">喻：你請朋友幫你買東西，店家不知道真正買家是你。</text:span></text:p>
          </table:table-cell>
          <table:table-cell table:style-name="表格117.A2" office:value-type="string">
            <text:p text:style-name="P25" loext:marker-style-name="T78"><text:span text:style-name="T77">流程：你 → </text:span><text:span text:style-name="T138">Reverse Proxy → </text:span><text:span text:style-name="T77">真正 </text:span><text:span text:style-name="T138">Server</text:span><text:span text:style-name="T77">。負載平衡、隱藏後端伺服器、</text:span><text:span text:style-name="T138">SSL </text:span><text:span text:style-name="T77">終止與安全防護。比喻：公</text:span><text:soft-page-break/><text:span text:style-name="T77">司大廳接待員分流訪客，客人不知道真正辦公室在哪層。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8"><text:span text:style-name="T176">🚧 <text:s/></text:span><text:span text:style-name="T47">封包闖關順序</text:span></text:p>
            <text:p text:style-name="P9" loext:marker-style-name="T101"><text:span text:style-name="T148">🧍 </text:span><text:span text:style-name="T99">使用者（</text:span><text:span text:style-name="T148">Client</text:span><text:span text:style-name="T99">）→ 🔵 </text:span><text:span text:style-name="T148">Proxy</text:span><text:span text:style-name="T99">（選用，隱藏 </text:span><text:span text:style-name="T148">IP/</text:span><text:span text:style-name="T99">上網控管）→ 🌍 </text:span><text:span text:style-name="T148">Internet → 🔥 FW/NGFW</text:span><text:span text:style-name="T99">（第一道防線，過濾 </text:span><text:span text:style-name="T148">IP/Port/</text:span><text:span text:style-name="T99">深度檢查）→ 🏝 </text:span><text:span text:style-name="T148">DMZ</text:span><text:span text:style-name="T99">（</text:span><text:span text:style-name="T148">Web/Mail/DNS </text:span><text:span text:style-name="T99">伺服器）→ 🛡 </text:span><text:span text:style-name="T148">WAF</text:span><text:span text:style-name="T99">（深度過濾 </text:span><text:span text:style-name="T148">HTTP</text:span><text:span text:style-name="T99">，防 </text:span><text:span text:style-name="T148">SQLi/XSS</text:span><text:span text:style-name="T99">）→ 🪞 </text:span><text:span text:style-name="T148">Reverse Proxy</text:span><text:span text:style-name="T99">（負載平衡</text:span><text:span text:style-name="T148">/</text:span><text:span text:style-name="T99">隱藏後端）→ 🏢 內部 </text:span><text:span text:style-name="T148">Server</text:span><text:span text:style-name="T99">（核心資產）。</text:span></text:p>
            <text:p text:style-name="P10" loext:marker-style-name="T101"><text:span text:style-name="T148">📌 </text:span><text:span text:style-name="T99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8"><text:span text:style-name="T176">🔑 <text:s/></text:span><text:span text:style-name="T226">萬用口訣</text:span></text:p>
            <text:p text:style-name="P9" loext:marker-style-name="T101"><text:span text:style-name="T148">FW </text:span><text:span text:style-name="T99">封外、</text:span><text:span text:style-name="T148">WAF </text:span><text:span text:style-name="T99">看內、</text:span><text:span text:style-name="T148">NGFW </text:span><text:span text:style-name="T99">最強、</text:span><text:span text:style-name="T148">DMZ </text:span><text:span text:style-name="T99">隔離、</text:span><text:span text:style-name="T148">IOC </text:span><text:span text:style-name="T99">壞人、</text:span><text:span text:style-name="T148">Proxy </text:span><text:span text:style-name="T99">幫客、</text:span><text:span text:style-name="T148">Reverse </text:span><text:span text:style-name="T99">幫服。</text:span></text:p>
          </table:table-cell>
        </table:table-row>
      </table:table>
      <text:h text:style-name="P2" text:outline-level="2" loext:marker-style-name="T27"><text:span text:style-name="T28">貳、</text:span><text:span text:style-name="T27">SQL Injection × Zero-Day × </text:span><text:span text:style-name="T28">防禦機制</text:span></text:h>
      <text:h text:style-name="P3" text:outline-level="3"><text:span text:style-name="T178">▍</text:span><text:span text:style-name="T179"> SQL Injection</text:span><text:span text:style-name="T180">（</text:span><text:span text:style-name="T179">SQL </text:span><text:span text:style-name="T180">注入攻擊）</text:span></text:h>
      <text:p text:style-name="P32" loext:marker-style-name="T101"><text:span text:style-name="T99">當你在登入頁輸入帳密，後端會把輸入組合成 </text:span><text:span text:style-name="T148">SQL </text:span><text:span text:style-name="T99">送到資料庫查詢，例如：</text:span><text:span text:style-name="T148">SELECT * FROM users WHERE account='john' AND password='1234'</text:span><text:span text:style-name="T99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8"><text:span text:style-name="T176">💉 <text:s/></text:span><text:span text:style-name="T198">什麼是 </text:span><text:span text:style-name="T202">SQL Injection</text:span><text:span text:style-name="T198">？</text:span></text:p>
            <text:p text:style-name="P9"><text:span text:style-name="T194">核心一句話：</text:span><text:span text:style-name="T99">把原本只是「資料」的輸入，惡意改造成可執行的「</text:span><text:span text:style-name="T148">SQL </text:span><text:span text:style-name="T99">指令」。</text:span></text:p>
            <text:p text:style-name="P10" loext:marker-style-name="T101"><text:span text:style-name="T99">駭客在帳號欄位輸入：</text:span><text:span text:style-name="T148">' OR 1=1 --</text:span><text:span text:style-name="T99">，拼入後變成：…</text:span><text:span text:style-name="T148">WHERE account='' OR 1=1 -- ' AND password='1234'</text:span><text:span text:style-name="T99">。</text:span></text:p>
            <text:p text:style-name="P10" loext:marker-style-name="T101"><text:span text:style-name="T148">OR 1=1 </text:span><text:span text:style-name="T99">永遠成立 → 查出所有使用者；</text:span><text:span text:style-name="T148">-- </text:span><text:span text:style-name="T99">是 </text:span><text:span text:style-name="T148">SQL </text:span><text:span text:style-name="T99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2" loext:marker-style-name="T65"><text:span text:style-name="T74">❌ </text:span><text:span text:style-name="T64">攻擊成功的原因</text:span></text:p>
          </table:table-cell>
          <table:covered-table-cell/>
          <table:table-cell table:style-name="表格119.A2" office:value-type="string">
            <text:p text:style-name="P22" loext:marker-style-name="T65"><text:span text:style-name="T74">✅ </text:span><text:span text:style-name="T64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5" loext:marker-style-name="T78"><text:span text:style-name="T138">① OR 1=1 </text:span><text:span text:style-name="T77">永遠成立，回傳全部使用者 ② </text:span><text:span text:style-name="T138">-- </text:span><text:span text:style-name="T77">把密碼驗證段註解掉 ③ 工程師直接用字串拼接組 </text:span><text:span text:style-name="T138">SQL</text:span><text:span text:style-name="T77">，沒有驗證輸入</text:span></text:p>
          </table:table-cell>
          <table:covered-table-cell/>
          <table:table-cell table:style-name="表格119.A3" office:value-type="string">
            <text:p text:style-name="P25" loext:marker-style-name="T78"><text:span text:style-name="T77">把使用者輸入視為「純資料」，不允許改變 </text:span><text:span text:style-name="T138">SQL </text:span><text:span text:style-name="T77">結構；</text:span><text:span text:style-name="T138">SQL </text:span><text:span text:style-name="T77">骨架固定，不因任何輸入而改變；使用 </text:span><text:span text:style-name="T138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8"><text:span text:style-name="T176">🛡️ <text:s/></text:span><text:span text:style-name="T217">防禦核心：</text:span><text:span text:style-name="T223">Prepared Statement</text:span><text:span text:style-name="T217">（預備語句）</text:span></text:p>
            <text:p text:style-name="P9"><text:span text:style-name="T218">概念：</text:span><text:span text:style-name="T99">先把 </text:span><text:span text:style-name="T148">SQL </text:span><text:span text:style-name="T99">骨架「鎖死」，使用者只能填入資料，完全無法修改 </text:span><text:span text:style-name="T148">SQL </text:span><text:span text:style-name="T99">結構。</text:span></text:p>
            <text:p text:style-name="P10" loext:marker-style-name="T101"><text:span text:style-name="T148">❌ </text:span><text:span text:style-name="T99">危險寫法（字串拼接）：</text:span><text:span text:style-name="T148">sql = "SELECT * FROM users WHERE id='" + input + "'"</text:span><text:span text:style-name="T99">；輸入 </text:span><text:span text:style-name="T148">' OR 1=1 -- → </text:span><text:span text:style-name="T99">結構被竄改。</text:span></text:p>
            <text:p text:style-name="P10" loext:marker-style-name="T101"><text:span text:style-name="T148">✅ </text:span><text:span text:style-name="T99">安全寫法：</text:span><text:span text:style-name="T148">String sql = "SELECT * FROM users WHERE id=?"</text:span><text:span text:style-name="T99">；</text:span><text:span text:style-name="T148">? </text:span><text:span text:style-name="T99">是佔位符，</text:span><text:span text:style-name="T148">input </text:span><text:span text:style-name="T99">被視為純文字，</text:span><text:span text:style-name="T148">' OR 1=1 -- </text:span><text:span text:style-name="T99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6" loext:marker-style-name="T71"><text:span text:style-name="T70">輔助防禦手段</text:span><text:span text:style-name="T71"/></text:p>
          </table:table-cell>
          <table:table-cell table:style-name="表格119.A2" table:number-columns-spanned="2" office:value-type="string">
            <text:p text:style-name="P6" loext:marker-style-name="T71"><text:span text:style-name="T70">說明</text:span><text:span text:style-name="T71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 loext:marker-style-name="T129"><text:span text:style-name="T170">Prepared Statement</text:span><text:span text:style-name="T129"/></text:p>
          </table:table-cell>
          <table:table-cell table:style-name="表格119.A3" table:number-columns-spanned="2" office:value-type="string">
            <text:p text:style-name="P25" loext:marker-style-name="T129"><text:span text:style-name="T170">✅ </text:span><text:span text:style-name="T130">根本解決方案。</text:span><text:span text:style-name="T170">SQL </text:span><text:span text:style-name="T130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5" loext:marker-style-name="T129"><text:span text:style-name="T130">輸入驗證 </text:span><text:span text:style-name="T170">(Input Validation)</text:span></text:p>
          </table:table-cell>
          <table:table-cell table:style-name="表格119.A7" table:number-columns-spanned="2" office:value-type="string">
            <text:p text:style-name="P25" loext:marker-style-name="T129"><text:span text:style-name="T130">過濾或拒絕特殊字元（如單引號），輔助手段，但單靠此法仍可能被繞過。</text:span><text:span text:style-name="T129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 loext:marker-style-name="T129"><text:span text:style-name="T170">WAF</text:span><text:span text:style-name="T130">（網站應用防火牆）</text:span></text:p>
          </table:table-cell>
          <table:table-cell table:style-name="表格119.A3" table:number-columns-spanned="2" office:value-type="string">
            <text:p text:style-name="P25" loext:marker-style-name="T129"><text:span text:style-name="T130">偵測 </text:span><text:span text:style-name="T170">OR 1=1</text:span><text:span text:style-name="T130">、</text:span><text:span text:style-name="T170">UNION SELECT </text:span><text:span text:style-name="T130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5" loext:marker-style-name="T129"><text:span text:style-name="T130">最小權限原則</text:span><text:span text:style-name="T129"/></text:p>
          </table:table-cell>
          <table:table-cell table:style-name="表格119.A7" table:number-columns-spanned="2" office:value-type="string">
            <text:p text:style-name="P25" loext:marker-style-name="T129"><text:span text:style-name="T130">資料庫帳號只給應用程式必要的權限，避免帳號被拿下後資料全失。</text:span><text:span text:style-name="T129"/></text:p>
          </table:table-cell>
          <table:covered-table-cell/>
        </table:table-row>
      </table:table>
      <text:h text:style-name="P3" text:outline-level="3"><text:span text:style-name="T178">▍</text:span><text:span text:style-name="T179"> Zero-Day Attack</text:span><text:span text:style-name="T180">（零時差攻擊）</text:span></text:h>
      <text:p text:style-name="P32" loext:marker-style-name="T101"><text:span text:style-name="T148">Zero-Day </text:span><text:span text:style-name="T99">指一個「尚未被開發商發現或公開」的安全漏洞，在廠商來得及發布修補程式（</text:span><text:span text:style-name="T148">Patch</text:span><text:span text:style-name="T99">）之前，駭客就已利用它展開攻擊。命名由來：「</text:span><text:span text:style-name="T148">Day Zero</text:span><text:span text:style-name="T99">」代表廠商只有 </text:span><text:span text:style-name="T148">0 </text:span><text:span text:style-name="T99">天的時間來應對，沒有任何緩</text:span><text:soft-page-break/><text:span text:style-name="T99">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2" loext:marker-style-name="T65"><text:span text:style-name="T74">😱 </text:span><text:span text:style-name="T64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22" loext:marker-style-name="T65"><text:span text:style-name="T74">🏠 </text:span><text:span text:style-name="T64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5" loext:marker-style-name="T78"><text:span text:style-name="T77">傳統防毒靠「特徵碼（</text:span><text:span text:style-name="T138">Signature</text:span><text:span text:style-name="T77">）」辨識病毒，像通緝名單。但 </text:span><text:span text:style-name="T138">Zero-Day </text:span><text:span text:style-name="T77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5" loext:marker-style-name="T78"><text:span text:style-name="T77">你家大門有個秘密漏洞，你不知道、鎖廠不知道、所有人都不知道——只有小偷知道。小偷可以天天進你家，直到漏洞被發現並修補為止。</text:span><text:span text:style-name="T78"/></text:p>
          </table:table-cell>
        </table:table-row>
        <table:table-row table:style-name="表格120.1">
          <table:table-cell table:style-name="表格120.A1" office:value-type="string">
            <text:p text:style-name="P6" loext:marker-style-name="T71"><text:span text:style-name="T70">防禦層</text:span><text:span text:style-name="T71"/></text:p>
          </table:table-cell>
          <table:table-cell table:style-name="表格120.A1" office:value-type="string">
            <text:p text:style-name="P6" loext:marker-style-name="T71"><text:span text:style-name="T70">手段</text:span><text:span text:style-name="T71"/></text:p>
          </table:table-cell>
          <table:table-cell table:style-name="表格120.A1" table:number-columns-spanned="2" office:value-type="string">
            <text:p text:style-name="P6" loext:marker-style-name="T71"><text:span text:style-name="T70">說明</text:span><text:span text:style-name="T71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29"><text:span text:style-name="T130">修補</text:span><text:span text:style-name="T129"/></text:p>
          </table:table-cell>
          <table:table-cell table:style-name="表格120.A2" office:value-type="string">
            <text:p text:style-name="P25" loext:marker-style-name="T129"><text:span text:style-name="T170">Patch </text:span><text:span text:style-name="T130">更新</text:span></text:p>
          </table:table-cell>
          <table:table-cell table:style-name="表格120.A2" table:number-columns-spanned="2" office:value-type="string">
            <text:p text:style-name="P25" loext:marker-style-name="T129"><text:span text:style-name="T130">漏洞公開後立即套用廠商安全更新（這是最重要的行動）</text:span><text:span text:style-name="T129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5" loext:marker-style-name="T129"><text:span text:style-name="T130">偵測</text:span><text:span text:style-name="T129"/></text:p>
          </table:table-cell>
          <table:table-cell table:style-name="表格120.A5" office:value-type="string">
            <text:p text:style-name="P25" loext:marker-style-name="T129"><text:span text:style-name="T170">IDS / IPS</text:span><text:span text:style-name="T129"/></text:p>
          </table:table-cell>
          <table:table-cell table:style-name="表格120.A5" table:number-columns-spanned="2" office:value-type="string">
            <text:p text:style-name="P25" loext:marker-style-name="T129"><text:span text:style-name="T170">IDS </text:span><text:span text:style-name="T130">發現異常後發警報；</text:span><text:span text:style-name="T170">IPS </text:span><text:span text:style-name="T130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29"><text:span text:style-name="T130">深度檢查</text:span><text:span text:style-name="T129"/></text:p>
          </table:table-cell>
          <table:table-cell table:style-name="表格120.A2" office:value-type="string">
            <text:p text:style-name="P25" loext:marker-style-name="T129"><text:span text:style-name="T170">DPI</text:span><text:span text:style-name="T130">（深度封包檢查）</text:span></text:p>
          </table:table-cell>
          <table:table-cell table:style-name="表格120.A2" table:number-columns-spanned="2" office:value-type="string">
            <text:p text:style-name="P25" loext:marker-style-name="T129"><text:span text:style-name="T130">拆開檢查封包內容，偵測隱藏其中的攻擊指令</text:span><text:span text:style-name="T129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5" loext:marker-style-name="T129"><text:span text:style-name="T130">隔離</text:span><text:span text:style-name="T129"/></text:p>
          </table:table-cell>
          <table:table-cell table:style-name="表格120.A5" office:value-type="string">
            <text:p text:style-name="P25" loext:marker-style-name="T129"><text:span text:style-name="T130">網路分段</text:span><text:span text:style-name="T129"/></text:p>
          </table:table-cell>
          <table:table-cell table:style-name="表格120.A5" table:number-columns-spanned="2" office:value-type="string">
            <text:p text:style-name="P25" loext:marker-style-name="T129"><text:span text:style-name="T130">把網路切成多區，即使入侵一區也難橫向擴散</text:span><text:span text:style-name="T129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29"><text:span text:style-name="T130">降低風險</text:span><text:span text:style-name="T129"/></text:p>
          </table:table-cell>
          <table:table-cell table:style-name="表格120.A2" office:value-type="string">
            <text:p text:style-name="P25" loext:marker-style-name="T129"><text:span text:style-name="T130">最小權限原則</text:span><text:span text:style-name="T129"/></text:p>
          </table:table-cell>
          <table:table-cell table:style-name="表格120.A2" table:number-columns-spanned="2" office:value-type="string">
            <text:p text:style-name="P25" loext:marker-style-name="T129"><text:span text:style-name="T130">每個帳號只給必要的最低權限，減少淪陷後的損害</text:span><text:span text:style-name="T129"/></text:p>
          </table:table-cell>
          <table:covered-table-cell/>
        </table:table-row>
      </table:table>
      <text:h text:style-name="P3" text:outline-level="3"><text:span text:style-name="T178">▍</text:span><text:span text:style-name="T179"> </text:span><text:span text:style-name="T180">防禦機制速查：</text:span><text:span text:style-name="T179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6" loext:marker-style-name="T71"><text:span text:style-name="T70">機制</text:span><text:span text:style-name="T71"/></text:p>
            </table:table-cell>
            <table:table-cell table:style-name="表格121.A1" office:value-type="string">
              <text:p text:style-name="P6" loext:marker-style-name="T71"><text:span text:style-name="T70">白話比喻</text:span><text:span text:style-name="T71"/></text:p>
            </table:table-cell>
            <table:table-cell table:style-name="表格121.A1" office:value-type="string">
              <text:p text:style-name="P6" loext:marker-style-name="T71"><text:span text:style-name="T70">主要功能</text:span><text:span text:style-name="T71"/></text:p>
            </table:table-cell>
            <table:table-cell table:style-name="表格121.A1" office:value-type="string">
              <text:p text:style-name="P6" loext:marker-style-name="T71"><text:span text:style-name="T70">備註</text:span><text:span text:style-name="T71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5" loext:marker-style-name="T129"><text:span text:style-name="T170">Firewall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社區大門保全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依 </text:span><text:span text:style-name="T170">IP</text:span><text:span text:style-name="T130">、</text:span><text:span text:style-name="T170">Port</text:span><text:span text:style-name="T130">、協定決定允許或拒絕流量</text:span></text:p>
          </table:table-cell>
          <table:table-cell table:style-name="表格121.A2" office:value-type="string">
            <text:p text:style-name="P25" loext:marker-style-name="T129"><text:span text:style-name="T130">基礎但必要</text:span><text:span text:style-name="T129"/></text:p>
          </table:table-cell>
        </table:table-row>
        <table:table-row table:style-name="表格121.1">
          <table:table-cell table:style-name="表格121.A3" office:value-type="string">
            <text:p text:style-name="P25" loext:marker-style-name="T129"><text:span text:style-name="T170">IDS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監視器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偵測到異常流量後產生警報，不主動攔截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只警告</text:span><text:span text:style-name="T129"/></text:p>
          </table:table-cell>
        </table:table-row>
        <table:table-row table:style-name="表格121.1">
          <table:table-cell table:style-name="表格121.A2" office:value-type="string">
            <text:p text:style-name="P25" loext:marker-style-name="T129"><text:span text:style-name="T170">IPS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警衛直接攔人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自動阻斷偵測到的攻擊流量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直接阻擋</text:span><text:span text:style-name="T129"/></text:p>
          </table:table-cell>
        </table:table-row>
        <table:table-row table:style-name="表格121.1">
          <table:table-cell table:style-name="表格121.A3" office:value-type="string">
            <text:p text:style-name="P25" loext:marker-style-name="T129"><text:span text:style-name="T170">DPI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海關拆包裹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不只看封包表頭，深入檢查封包內容</text:span><text:span text:style-name="T129"/></text:p>
          </table:table-cell>
          <table:table-cell table:style-name="表格121.A3" office:value-type="string">
            <text:p text:style-name="P25" loext:marker-style-name="T129"><text:span text:style-name="T130">最深層檢查</text:span><text:span text:style-name="T129"/></text:p>
          </table:table-cell>
        </table:table-row>
        <table:table-row table:style-name="表格121.1">
          <table:table-cell table:style-name="表格121.A2" office:value-type="string">
            <text:p text:style-name="P25" loext:marker-style-name="T129"><text:span text:style-name="T170">WAF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網站門口掃描機</text:span><text:span text:style-name="T129"/></text:p>
          </table:table-cell>
          <table:table-cell table:style-name="表格121.A2" office:value-type="string">
            <text:p text:style-name="P25" loext:marker-style-name="T129"><text:span text:style-name="T130">專門針對 </text:span><text:span text:style-name="T170">Web </text:span><text:span text:style-name="T130">攻擊（</text:span><text:span text:style-name="T170">SQLi</text:span><text:span text:style-name="T130">、</text:span><text:span text:style-name="T170">XSS</text:span><text:span text:style-name="T130">）過濾</text:span></text:p>
          </table:table-cell>
          <table:table-cell table:style-name="表格121.A2" office:value-type="string">
            <text:p text:style-name="P25" loext:marker-style-name="T129"><text:span text:style-name="T130">網站專用</text:span><text:span text:style-name="T129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8"><text:span text:style-name="T176">⚠️ <text:s/></text:span><text:span text:style-name="T198">考試常考</text:span></text:p>
            <text:p text:style-name="P9" loext:marker-style-name="T101"><text:span text:style-name="T148">IDS </text:span><text:span text:style-name="T99">只發警報（不攔截）；</text:span><text:span text:style-name="T148">IPS </text:span><text:span text:style-name="T99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</text:span><text:span text:style-name="T180">駭客如何一步一步入侵網站（典型 </text:span><text:span text:style-name="T179">7 </text:span><text:span text:style-name="T180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2" loext:marker-style-name="T71"><text:span text:style-name="T76">Step</text:span><text:span text:style-name="T71"/></text:p>
            </table:table-cell>
            <table:table-cell table:style-name="表格122.A1" office:value-type="string">
              <text:p text:style-name="P22" loext:marker-style-name="T71"><text:span text:style-name="T70">階段</text:span><text:span text:style-name="T71"/></text:p>
            </table:table-cell>
            <table:table-cell table:style-name="表格122.A1" office:value-type="string">
              <text:p text:style-name="P22" loext:marker-style-name="T71"><text:span text:style-name="T70">做什麼</text:span><text:span text:style-name="T71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5" loext:marker-style-name="T129"><text:span text:style-name="T170">1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偵察 </text:span><text:span text:style-name="T170">Reconnaissance</text:span></text:p>
          </table:table-cell>
          <table:table-cell table:style-name="表格122.A2" office:value-type="string">
            <text:p text:style-name="P25" loext:marker-style-name="T129"><text:span text:style-name="T130">掃描目標網站，找漏洞：</text:span><text:span text:style-name="T170">SQL Injection</text:span><text:span text:style-name="T130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29"><text:span text:style-name="T170">2</text:span><text:span text:style-name="T129"/></text:p>
          </table:table-cell>
          <table:table-cell table:style-name="表格122.A3" office:value-type="string">
            <text:p text:style-name="P25" loext:marker-style-name="T129"><text:span text:style-name="T130">試探 </text:span><text:span text:style-name="T170">Probing</text:span></text:p>
          </table:table-cell>
          <table:table-cell table:style-name="表格122.A3" office:value-type="string">
            <text:p text:style-name="P25" loext:marker-style-name="T129"><text:span text:style-name="T130">嘗試輸入 </text:span><text:span text:style-name="T170">' OR 1=1 -- </text:span><text:span text:style-name="T130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29"><text:span text:style-name="T170">3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取得初步權限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成功繞過驗證或取得資料庫讀取權，可能拿到帳密清單</text:span><text:span text:style-name="T129"/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29"><text:span text:style-name="T170">4</text:span><text:span text:style-name="T129"/></text:p>
          </table:table-cell>
          <table:table-cell table:style-name="表格122.A3" office:value-type="string">
            <text:p text:style-name="P25" loext:marker-style-name="T129"><text:span text:style-name="T130">橫向移動 </text:span><text:span text:style-name="T170">Lateral Movement</text:span></text:p>
          </table:table-cell>
          <table:table-cell table:style-name="表格122.A3" office:value-type="string">
            <text:p text:style-name="P25" loext:marker-style-name="T129"><text:span text:style-name="T130">從網站主機延伸進資料庫，再滲透內網其他系統</text:span><text:span text:style-name="T129"/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29"><text:span text:style-name="T170">5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竊取資料 </text:span><text:span text:style-name="T170">Exfiltration</text:span></text:p>
          </table:table-cell>
          <table:table-cell table:style-name="表格122.A2" office:value-type="string">
            <text:p text:style-name="P25" loext:marker-style-name="T129"><text:span text:style-name="T130">偷取個資、信用卡資料、機密文件</text:span><text:span text:style-name="T129"/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29"><text:span text:style-name="T170">6</text:span><text:span text:style-name="T129"/></text:p>
          </table:table-cell>
          <table:table-cell table:style-name="表格122.A3" office:value-type="string">
            <text:p text:style-name="P25" loext:marker-style-name="T129"><text:span text:style-name="T130">植入後門 </text:span><text:span text:style-name="T170">Backdoor</text:span></text:p>
          </table:table-cell>
          <table:table-cell table:style-name="表格122.A3" office:value-type="string">
            <text:p text:style-name="P25" loext:marker-style-name="T129"><text:span text:style-name="T130">埋下後門程式，確保下次還能輕鬆進入</text:span><text:span text:style-name="T129"/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29"><text:span text:style-name="T170">7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勒索或變現</text:span><text:span text:style-name="T129"/></text:p>
          </table:table-cell>
          <table:table-cell table:style-name="表格122.A2" office:value-type="string">
            <text:p text:style-name="P25" loext:marker-style-name="T129"><text:span text:style-name="T130">加密資料索取贖金，或在暗網販售竊取的資料</text:span><text:span text:style-name="T129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8"><text:span text:style-name="T176">⚠️ <text:s/></text:span><text:span text:style-name="T198">公職考試常見陷阱</text:span></text:p>
            <text:p text:style-name="P9"><text:span text:style-name="T114">「輸入驗證」就足夠防 </text:span><text:span text:style-name="T157">SQLi</text:span><text:span text:style-name="T114">？　</text:span><text:span text:style-name="T99">❌ 不夠，過濾特殊字元有被繞過風險。✅ 真正防禦是 </text:span><text:span text:style-name="T148">Prepared Statement</text:span><text:span text:style-name="T99">。</text:span></text:p>
            <text:p text:style-name="P10"><text:span text:style-name="T157">WAF </text:span><text:span text:style-name="T114">可以完全防止所有攻擊？　</text:span><text:span text:style-name="T99">❌ 不能，</text:span><text:span text:style-name="T148">WAF </text:span><text:span text:style-name="T99">是輔助防禦，新型攻擊可能繞過。✅ </text:span><text:span text:style-name="T148">WAF + Prepared Statement </text:span><text:span text:style-name="T99">才是正道。</text:span></text:p>
            <text:p text:style-name="P10"><text:span text:style-name="T157">Zero-Day </text:span><text:span text:style-name="T114">最危險是它「很強大」？　</text:span><text:span text:style-name="T99">❌ 不是，最危險的是「還沒人知道」，防毒無法識別。</text:span></text:p>
            <text:p text:style-name="P10"><text:soft-page-break/><text:span text:style-name="T157">IDS </text:span><text:span text:style-name="T114">可以阻擋攻擊？　</text:span><text:span text:style-name="T99">❌ 不行，</text:span><text:span text:style-name="T148">IDS </text:span><text:span text:style-name="T99">只能偵測警報，能阻擋的是 </text:span><text:span text:style-name="T148">IPS</text:span><text:span text:style-name="T99">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6" loext:marker-style-name="T65"><text:span text:style-name="T64">工具</text:span><text:span text:style-name="T65"/></text:p>
            </table:table-cell>
            <table:table-cell table:style-name="表格123.A1" office:value-type="string">
              <text:p text:style-name="P6" loext:marker-style-name="T65"><text:span text:style-name="T64">角色</text:span><text:span text:style-name="T65"/></text:p>
            </table:table-cell>
            <table:table-cell table:style-name="表格123.A1" office:value-type="string">
              <text:p text:style-name="P6" loext:marker-style-name="T65"><text:span text:style-name="T64">功能</text:span><text:span text:style-name="T65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5" loext:marker-style-name="T78"><text:span text:style-name="T138">🚪 Firewall</text:span><text:span text:style-name="T78"/></text:p>
          </table:table-cell>
          <table:table-cell table:style-name="表格123.A2" office:value-type="string">
            <text:p text:style-name="P25" loext:marker-style-name="T78"><text:span text:style-name="T77">大門警衛</text:span><text:span text:style-name="T78"/></text:p>
          </table:table-cell>
          <table:table-cell table:style-name="表格123.A2" office:value-type="string">
            <text:p text:style-name="P25" loext:marker-style-name="T78"><text:span text:style-name="T77">過濾進出流量（擋或放）</text:span><text:span text:style-name="T78"/></text:p>
          </table:table-cell>
        </table:table-row>
        <table:table-row table:style-name="表格123.1">
          <table:table-cell table:style-name="表格123.A3" office:value-type="string">
            <text:p text:style-name="P25" loext:marker-style-name="T78"><text:span text:style-name="T138">👀 IDS</text:span><text:span text:style-name="T78"/></text:p>
          </table:table-cell>
          <table:table-cell table:style-name="表格123.A3" office:value-type="string">
            <text:p text:style-name="P25" loext:marker-style-name="T78"><text:span text:style-name="T77">監視器（只看）</text:span><text:span text:style-name="T78"/></text:p>
          </table:table-cell>
          <table:table-cell table:style-name="表格123.A3" office:value-type="string">
            <text:p text:style-name="P25" loext:marker-style-name="T78"><text:span text:style-name="T77">偵測異常、發出警報，不主動阻擋</text:span><text:span text:style-name="T78"/></text:p>
          </table:table-cell>
        </table:table-row>
        <table:table-row table:style-name="表格123.1">
          <table:table-cell table:style-name="表格123.A2" office:value-type="string">
            <text:p text:style-name="P25" loext:marker-style-name="T78"><text:span text:style-name="T138">🚨 IPS</text:span><text:span text:style-name="T78"/></text:p>
          </table:table-cell>
          <table:table-cell table:style-name="表格123.A2" office:value-type="string">
            <text:p text:style-name="P25" loext:marker-style-name="T78"><text:span text:style-name="T77">監視器＋警衛</text:span><text:span text:style-name="T78"/></text:p>
          </table:table-cell>
          <table:table-cell table:style-name="表格123.A2" office:value-type="string">
            <text:p text:style-name="P25" loext:marker-style-name="T78"><text:span text:style-name="T77">偵測異常並自動阻擋攻擊</text:span><text:span text:style-name="T78"/></text:p>
          </table:table-cell>
        </table:table-row>
        <table:table-row table:style-name="表格123.1">
          <table:table-cell table:style-name="表格123.A3" office:value-type="string">
            <text:p text:style-name="P25" loext:marker-style-name="T78"><text:span text:style-name="T138">📊 SNMP</text:span><text:span text:style-name="T78"/></text:p>
          </table:table-cell>
          <table:table-cell table:style-name="表格123.A3" office:value-type="string">
            <text:p text:style-name="P25" loext:marker-style-name="T78"><text:span text:style-name="T77">管理室</text:span><text:span text:style-name="T78"/></text:p>
          </table:table-cell>
          <table:table-cell table:style-name="表格123.A3" office:value-type="string">
            <text:p text:style-name="P25" loext:marker-style-name="T78"><text:span text:style-name="T77">監控網路設備狀態（</text:span><text:span text:style-name="T138">CPU</text:span><text:span text:style-name="T77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5" loext:marker-style-name="T78"><text:span text:style-name="T138">📶 ICMP</text:span><text:span text:style-name="T78"/></text:p>
          </table:table-cell>
          <table:table-cell table:style-name="表格123.A2" office:value-type="string">
            <text:p text:style-name="P25" loext:marker-style-name="T78"><text:span text:style-name="T77">網路測試員</text:span><text:span text:style-name="T78"/></text:p>
          </table:table-cell>
          <table:table-cell table:style-name="表格123.A2" office:value-type="string">
            <text:p text:style-name="P25" loext:marker-style-name="T78"><text:span text:style-name="T77">診斷網路連線（</text:span><text:span text:style-name="T138">Ping / Traceroute</text:span><text:span text:style-name="T77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8"><text:span text:style-name="T176">⚡ <text:s/></text:span><text:span text:style-name="T180">核心記憶口訣</text:span></text:p>
            <text:p text:style-name="P9" loext:marker-style-name="T101"><text:span text:style-name="T148">Firewall </text:span><text:span text:style-name="T99">擋入口 </text:span><text:span text:style-name="T148">· IDS </text:span><text:span text:style-name="T99">只看 </text:span><text:span text:style-name="T148">· IPS </text:span><text:span text:style-name="T99">看＋擋。</text:span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HIDS vs NIDS</text:span><text:span text:style-name="T180">（</text:span><text:span text:style-name="T179">IDS </text:span><text:span text:style-name="T180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6" loext:marker-style-name="T65"><text:span text:style-name="T74">HIDS</text:span><text:span text:style-name="T65"/></text:p>
            </table:table-cell>
            <table:table-cell table:style-name="表格124.A1" office:value-type="string">
              <text:p text:style-name="P6" loext:marker-style-name="T65"><text:span text:style-name="T74">NIDS</text:span><text:span text:style-name="T65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5" loext:marker-style-name="T78"><text:span text:style-name="T77">安裝位置</text:span><text:span text:style-name="T78"/></text:p>
          </table:table-cell>
          <table:table-cell table:style-name="表格124.A2" office:value-type="string">
            <text:p text:style-name="P25" loext:marker-style-name="T78"><text:span text:style-name="T77">裝在主機（電腦）內部</text:span><text:span text:style-name="T78"/></text:p>
          </table:table-cell>
          <table:table-cell table:style-name="表格124.A2" office:value-type="string">
            <text:p text:style-name="P25" loext:marker-style-name="T78"><text:span text:style-name="T77">裝在網路節點（交換器旁）</text:span><text:span text:style-name="T78"/></text:p>
          </table:table-cell>
        </table:table-row>
        <table:table-row table:style-name="表格124.1">
          <table:table-cell table:style-name="表格124.A3" office:value-type="string">
            <text:p text:style-name="P25" loext:marker-style-name="T78"><text:span text:style-name="T77">監控內容</text:span><text:span text:style-name="T78"/></text:p>
          </table:table-cell>
          <table:table-cell table:style-name="表格124.A3" office:value-type="string">
            <text:p text:style-name="P25" loext:marker-style-name="T78"><text:span text:style-name="T77">系統 </text:span><text:span text:style-name="T138">Log</text:span><text:span text:style-name="T77">、使用者行為</text:span></text:p>
          </table:table-cell>
          <table:table-cell table:style-name="表格124.A3" office:value-type="string">
            <text:p text:style-name="P25" loext:marker-style-name="T78"><text:span text:style-name="T77">網路封包與流量</text:span><text:span text:style-name="T78"/></text:p>
          </table:table-cell>
        </table:table-row>
        <table:table-row table:style-name="表格124.1">
          <table:table-cell table:style-name="表格124.A2" office:value-type="string">
            <text:p text:style-name="P25" loext:marker-style-name="T78"><text:span text:style-name="T77">比喻</text:span><text:span text:style-name="T78"/></text:p>
          </table:table-cell>
          <table:table-cell table:style-name="表格124.A2" office:value-type="string">
            <text:p text:style-name="P25" loext:marker-style-name="T78"><text:span text:style-name="T77">電腦裡的監視器</text:span><text:span text:style-name="T78"/></text:p>
          </table:table-cell>
          <table:table-cell table:style-name="表格124.A2" office:value-type="string">
            <text:p text:style-name="P25" loext:marker-style-name="T78"><text:span text:style-name="T77">路口的交通監視器</text:span><text:span text:style-name="T78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8"><text:span text:style-name="T176">⚡ <text:s/></text:span><text:span text:style-name="T180">一句話秒懂</text:span></text:p>
            <text:p text:style-name="P9" loext:marker-style-name="T101"><text:span text:style-name="T148">HIDS </text:span><text:span text:style-name="T99">看主機（</text:span><text:span text:style-name="T148">Log</text:span><text:span text:style-name="T99">）</text:span><text:span text:style-name="T148">· NIDS </text:span><text:span text:style-name="T99">看網路（封包）。</text:span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SNMP vs ICMP</text:span><text:span text:style-name="T180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6" loext:marker-style-name="T65"><text:span text:style-name="T74">SNMP</text:span><text:span text:style-name="T65"/></text:p>
            </table:table-cell>
            <table:table-cell table:style-name="表格125.A1" office:value-type="string">
              <text:p text:style-name="P6" loext:marker-style-name="T65"><text:span text:style-name="T74">ICMP</text:span><text:span text:style-name="T65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5" loext:marker-style-name="T78"><text:span text:style-name="T77">用途</text:span><text:span text:style-name="T78"/></text:p>
          </table:table-cell>
          <table:table-cell table:style-name="表格125.A2" office:value-type="string">
            <text:p text:style-name="P25" loext:marker-style-name="T78"><text:span text:style-name="T77">管理與監控網路設備</text:span><text:span text:style-name="T78"/></text:p>
          </table:table-cell>
          <table:table-cell table:style-name="表格125.A2" office:value-type="string">
            <text:p text:style-name="P25" loext:marker-style-name="T78"><text:span text:style-name="T77">測試網路是否連通</text:span><text:span text:style-name="T78"/></text:p>
          </table:table-cell>
        </table:table-row>
        <table:table-row table:style-name="表格125.1">
          <table:table-cell table:style-name="表格125.A3" office:value-type="string">
            <text:p text:style-name="P25" loext:marker-style-name="T78"><text:span text:style-name="T138">OSI </text:span><text:span text:style-name="T77">層</text:span></text:p>
          </table:table-cell>
          <table:table-cell table:style-name="表格125.A3" office:value-type="string">
            <text:p text:style-name="P25" loext:marker-style-name="T78"><text:span text:style-name="T138">Application Layer</text:span><text:span text:style-name="T77">（應用層）</text:span></text:p>
          </table:table-cell>
          <table:table-cell table:style-name="表格125.A3" office:value-type="string">
            <text:p text:style-name="P25" loext:marker-style-name="T78"><text:span text:style-name="T138">Network Layer</text:span><text:span text:style-name="T77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5" loext:marker-style-name="T78"><text:span text:style-name="T77">傳輸協定</text:span><text:span text:style-name="T78"/></text:p>
          </table:table-cell>
          <table:table-cell table:style-name="表格125.A2" office:value-type="string">
            <text:p text:style-name="P25" loext:marker-style-name="T78"><text:span text:style-name="T138">UDP</text:span><text:span text:style-name="T78"/></text:p>
          </table:table-cell>
          <table:table-cell table:style-name="表格125.A2" office:value-type="string">
            <text:p text:style-name="P25" loext:marker-style-name="T78"><text:span text:style-name="T138">IP </text:span><text:span text:style-name="T77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5" loext:marker-style-name="T78"><text:span text:style-name="T77">常見功能</text:span><text:span text:style-name="T78"/></text:p>
          </table:table-cell>
          <table:table-cell table:style-name="表格125.A3" office:value-type="string">
            <text:p text:style-name="P25" loext:marker-style-name="T78"><text:span text:style-name="T77">看 </text:span><text:span text:style-name="T138">CPU </text:span><text:span text:style-name="T77">使用率、設備狀態、</text:span><text:span text:style-name="T138">Trap </text:span><text:span text:style-name="T77">警報</text:span></text:p>
          </table:table-cell>
          <table:table-cell table:style-name="表格125.A3" office:value-type="string">
            <text:p text:style-name="P25" loext:marker-style-name="T78"><text:span text:style-name="T138">Ping</text:span><text:span text:style-name="T77">、</text:span><text:span text:style-name="T138">Traceroute</text:span></text:p>
          </table:table-cell>
        </table:table-row>
        <table:table-row table:style-name="表格125.1">
          <table:table-cell table:style-name="表格125.A2" office:value-type="string">
            <text:p text:style-name="P25" loext:marker-style-name="T78"><text:span text:style-name="T77">比喻</text:span><text:span text:style-name="T78"/></text:p>
          </table:table-cell>
          <table:table-cell table:style-name="表格125.A2" office:value-type="string">
            <text:p text:style-name="P25" loext:marker-style-name="T78"><text:span text:style-name="T77">大樓管理室的監控系統</text:span><text:span text:style-name="T78"/></text:p>
          </table:table-cell>
          <table:table-cell table:style-name="表格125.A2" office:value-type="string">
            <text:p text:style-name="P25" loext:marker-style-name="T78"><text:span text:style-name="T77">網路連線的體溫計</text:span><text:span text:style-name="T78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8"><text:span text:style-name="T176">⚡ <text:s/></text:span><text:span text:style-name="T180">核心差異</text:span></text:p>
            <text:p text:style-name="P9" loext:marker-style-name="T101"><text:span text:style-name="T148">SNMP </text:span><text:span text:style-name="T99">管理設備（應用層 </text:span><text:span text:style-name="T148">/ UDP</text:span><text:span text:style-name="T99">）</text:span><text:span text:style-name="T148">· ICMP </text:span><text:span text:style-name="T99">診斷網路（網路層）。</text:span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</text:span><text:span text:style-name="T180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8"><text:span text:style-name="T176">🗺 <text:s/></text:span><text:span text:style-name="T47">工具各自負責的位置</text:span></text:p>
            <text:p text:style-name="P9" loext:marker-style-name="T101"><text:span text:style-name="T148">🌐 </text:span><text:span text:style-name="T99">外部攻擊者 → 🚪 </text:span><text:span text:style-name="T148">Firewall</text:span><text:span text:style-name="T99">（第一道防線，依 </text:span><text:span text:style-name="T148">IP/Port </text:span><text:span text:style-name="T99">規則過濾）→ 📡 </text:span><text:span text:style-name="T148">NIDS / IPS</text:span><text:span text:style-name="T99">（網路中間監控：</text:span><text:span text:style-name="T148">IDS </text:span><text:span text:style-name="T99">分析封包發現異常只發警報；</text:span><text:span text:style-name="T148">IPS </text:span><text:span text:style-name="T99">分析封包發現異常直接阻擋）→ 🖥 主機 </text:span><text:span text:style-name="T148">/ Server → 👀 HIDS</text:span><text:span text:style-name="T99">（主機內部最後防線，監控系統 </text:span><text:span text:style-name="T148">Log </text:span><text:span text:style-name="T99">與使用者行為）。旁側：📊 </text:span><text:span text:style-name="T148">SNMP </text:span><text:span text:style-name="T99">監控全域設備狀態；📶 </text:span><text:span text:style-name="T148">ICMP</text:span><text:span text:style-name="T99">（</text:span><text:span text:style-name="T148">Ping/Traceroute</text:span><text:span text:style-name="T99">）測試連線。</text:span></text:p>
          </table:table-cell>
        </table:table-row>
        <text:soft-page-break/>
        <table:table-row table:style-name="表格126.1">
          <table:table-cell table:style-name="表格126.A2" office:value-type="string">
            <text:p text:style-name="P8"><text:span text:style-name="T176">⚠️ <text:s/></text:span><text:span text:style-name="T198">考試陷阱整理</text:span></text:p>
            <text:p text:style-name="P9"><text:span text:style-name="T214">① IDS </text:span><text:span text:style-name="T208">可以自動阻擋攻擊　→　</text:span><text:span text:style-name="T99">✓ </text:span><text:span text:style-name="T148">IDS </text:span><text:span text:style-name="T99">只偵測＋發警報，</text:span><text:span text:style-name="T148">IPS </text:span><text:span text:style-name="T99">才會阻擋。</text:span></text:p>
            <text:p text:style-name="P10"><text:span text:style-name="T214">② Firewall </text:span><text:span text:style-name="T208">可以偵測異常行為　→　</text:span><text:span text:style-name="T99">✓ </text:span><text:span text:style-name="T148">Firewall </text:span><text:span text:style-name="T99">依規則（</text:span><text:span text:style-name="T148">IP/Port</text:span><text:span text:style-name="T99">）過濾，不做行為分析。</text:span></text:p>
            <text:p text:style-name="P10"><text:span text:style-name="T214">③ HIDS </text:span><text:span text:style-name="T208">用來監控網路封包　→　</text:span><text:span text:style-name="T99">✓ </text:span><text:span text:style-name="T148">HIDS </text:span><text:span text:style-name="T99">監控主機 </text:span><text:span text:style-name="T148">Log </text:span><text:span text:style-name="T99">與系統行為，封包是 </text:span><text:span text:style-name="T148">NIDS </text:span><text:span text:style-name="T99">的工作。</text:span></text:p>
            <text:p text:style-name="P10"><text:span text:style-name="T214">④ ICMP </text:span><text:span text:style-name="T208">用來監控設備狀態　→　</text:span><text:span text:style-name="T99">✓ </text:span><text:span text:style-name="T148">ICMP </text:span><text:span text:style-name="T99">只診斷網路（</text:span><text:span text:style-name="T148">Ping</text:span><text:span text:style-name="T99">），監控設備是 </text:span><text:span text:style-name="T148">SNMP</text:span><text:span text:style-name="T99">。</text:span></text:p>
            <text:p text:style-name="P10"><text:span text:style-name="T214">⑤ ICMP </text:span><text:span text:style-name="T208">屬於 </text:span><text:span text:style-name="T214">Application Layer</text:span><text:span text:style-name="T208">　→　</text:span><text:span text:style-name="T99">✓ </text:span><text:span text:style-name="T148">ICMP </text:span><text:span text:style-name="T99">屬 </text:span><text:span text:style-name="T148">Network Layer</text:span><text:span text:style-name="T99">，</text:span><text:span text:style-name="T148">SNMP </text:span><text:span text:style-name="T99">才是 </text:span><text:span text:style-name="T148">Application Layer</text:span><text:span text:style-name="T99">。</text:span></text:p>
            <text:p text:style-name="P10"><text:span text:style-name="T214">⑥ IPS </text:span><text:span text:style-name="T208">就是防火牆　→　</text:span><text:span text:style-name="T99">✓ </text:span><text:span text:style-name="T148">Firewall </text:span><text:span text:style-name="T99">靜態過濾（規則），</text:span><text:span text:style-name="T148">IPS </text:span><text:span text:style-name="T99">動態偵測行為後阻擋，兩者不同。</text:span></text:p>
          </table:table-cell>
        </table:table-row>
      </table:table>
      <text:h text:style-name="P3" text:outline-level="3"><text:span text:style-name="T178">▍</text:span><text:span text:style-name="T179"> 10 </text:span><text:span text:style-name="T180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6" loext:marker-style-name="T73"><text:span text:style-name="T72">題目</text:span><text:span text:style-name="T73"/></text:p>
            </table:table-cell>
            <table:table-cell table:style-name="表格127.A1" office:value-type="string">
              <text:p text:style-name="P6" loext:marker-style-name="T73"><text:span text:style-name="T72">答案</text:span><text:span text:style-name="T73"/></text:p>
            </table:table-cell>
            <table:table-cell table:style-name="表格127.A1" office:value-type="string">
              <text:p text:style-name="P6" loext:marker-style-name="T73"><text:span text:style-name="T72">解析</text:span><text:span text:style-name="T73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5" loext:marker-style-name="T137"><text:span text:style-name="T174">Q1 </text:span><text:span text:style-name="T136">何者負責「過濾進出網路流量」？</text:span></text:p>
          </table:table-cell>
          <table:table-cell table:style-name="表格127.A2" office:value-type="string">
            <text:p text:style-name="P25" loext:marker-style-name="T137"><text:span text:style-name="T174">Firewall</text:span><text:span text:style-name="T137"/></text:p>
          </table:table-cell>
          <table:table-cell table:style-name="表格127.A2" office:value-type="string">
            <text:p text:style-name="P25" loext:marker-style-name="T137"><text:span text:style-name="T174">Firewall </text:span><text:span text:style-name="T136">是網路入口過濾工具，依規則決定放行。</text:span><text:span text:style-name="T174">IDS/IPS </text:span><text:span text:style-name="T136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37"><text:span text:style-name="T174">Q2 IDS </text:span><text:span text:style-name="T136">的主要功能為何？</text:span></text:p>
          </table:table-cell>
          <table:table-cell table:style-name="表格127.A3" office:value-type="string">
            <text:p text:style-name="P25" loext:marker-style-name="T137"><text:span text:style-name="T136">偵測並發出警報</text:span><text:span text:style-name="T137"/></text:p>
          </table:table-cell>
          <table:table-cell table:style-name="表格127.A3" office:value-type="string">
            <text:p text:style-name="P25" loext:marker-style-name="T137"><text:span text:style-name="T174">IDS </text:span><text:span text:style-name="T136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37"><text:span text:style-name="T174">Q3 IPS </text:span><text:span text:style-name="T136">與 </text:span><text:span text:style-name="T174">IDS </text:span><text:span text:style-name="T136">最大差別？</text:span></text:p>
          </table:table-cell>
          <table:table-cell table:style-name="表格127.A2" office:value-type="string">
            <text:p text:style-name="P25" loext:marker-style-name="T137"><text:span text:style-name="T174">IPS </text:span><text:span text:style-name="T136">會阻擋，</text:span><text:span text:style-name="T174">IDS </text:span><text:span text:style-name="T136">不會</text:span></text:p>
          </table:table-cell>
          <table:table-cell table:style-name="表格127.A2" office:value-type="string">
            <text:p text:style-name="P25" loext:marker-style-name="T137"><text:span text:style-name="T174">IPS = IDS </text:span><text:span text:style-name="T136">全功能 </text:span><text:span text:style-name="T174">+ </text:span><text:span text:style-name="T136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37"><text:span text:style-name="T174">Q4 </text:span><text:span text:style-name="T136">何者屬「主機型入侵偵測」？</text:span></text:p>
          </table:table-cell>
          <table:table-cell table:style-name="表格127.A3" office:value-type="string">
            <text:p text:style-name="P25" loext:marker-style-name="T137"><text:span text:style-name="T174">HIDS</text:span><text:span text:style-name="T137"/></text:p>
          </table:table-cell>
          <table:table-cell table:style-name="表格127.A3" office:value-type="string">
            <text:p text:style-name="P25" loext:marker-style-name="T137"><text:span text:style-name="T174">HIDS </text:span><text:span text:style-name="T136">安裝於主機內部，監控 </text:span><text:span text:style-name="T174">Log </text:span><text:span text:style-name="T136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37"><text:span text:style-name="T174">Q5 NIDS </text:span><text:span text:style-name="T136">主要監控什麼？</text:span></text:p>
          </table:table-cell>
          <table:table-cell table:style-name="表格127.A2" office:value-type="string">
            <text:p text:style-name="P25" loext:marker-style-name="T137"><text:span text:style-name="T136">網路封包</text:span><text:span text:style-name="T137"/></text:p>
          </table:table-cell>
          <table:table-cell table:style-name="表格127.A2" office:value-type="string">
            <text:p text:style-name="P25" loext:marker-style-name="T137"><text:span text:style-name="T174">NIDS </text:span><text:span text:style-name="T136">部署在網路節點，分析封包流量；</text:span><text:span text:style-name="T174">HIDS </text:span><text:span text:style-name="T136">才看 </text:span><text:span text:style-name="T174">Log</text:span><text:span text:style-name="T136">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37"><text:span text:style-name="T174">Q6 SNMP </text:span><text:span text:style-name="T136">的主要用途？</text:span></text:p>
          </table:table-cell>
          <table:table-cell table:style-name="表格127.A3" office:value-type="string">
            <text:p text:style-name="P25" loext:marker-style-name="T137"><text:span text:style-name="T136">管理網路設備</text:span><text:span text:style-name="T137"/></text:p>
          </table:table-cell>
          <table:table-cell table:style-name="表格127.A3" office:value-type="string">
            <text:p text:style-name="P25" loext:marker-style-name="T137"><text:span text:style-name="T174">SNMP </text:span><text:span text:style-name="T136">監控與管理路由器、交換器狀態（</text:span><text:span text:style-name="T174">CPU</text:span><text:span text:style-name="T136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37"><text:span text:style-name="T174">Q7 ICMP </text:span><text:span text:style-name="T136">常用於哪種工具？</text:span></text:p>
          </table:table-cell>
          <table:table-cell table:style-name="表格127.A2" office:value-type="string">
            <text:p text:style-name="P25" loext:marker-style-name="T137"><text:span text:style-name="T174">Ping</text:span><text:span text:style-name="T137"/></text:p>
          </table:table-cell>
          <table:table-cell table:style-name="表格127.A2" office:value-type="string">
            <text:p text:style-name="P25" loext:marker-style-name="T137"><text:span text:style-name="T174">Ping </text:span><text:span text:style-name="T136">與 </text:span><text:span text:style-name="T174">Traceroute </text:span><text:span text:style-name="T136">都用 </text:span><text:span text:style-name="T174">ICMP </text:span><text:span text:style-name="T136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37"><text:span text:style-name="T174">Q8 ICMP </text:span><text:span text:style-name="T136">屬 </text:span><text:span text:style-name="T174">OSI </text:span><text:span text:style-name="T136">哪一層？</text:span></text:p>
          </table:table-cell>
          <table:table-cell table:style-name="表格127.A3" office:value-type="string">
            <text:p text:style-name="P25" loext:marker-style-name="T137"><text:span text:style-name="T174">Network Layer</text:span><text:span text:style-name="T137"/></text:p>
          </table:table-cell>
          <table:table-cell table:style-name="表格127.A3" office:value-type="string">
            <text:p text:style-name="P25" loext:marker-style-name="T137"><text:span text:style-name="T174">ICMP </text:span><text:span text:style-name="T136">是 </text:span><text:span text:style-name="T174">IP </text:span><text:span text:style-name="T136">的附屬協定，屬網路層；</text:span><text:span text:style-name="T174">SNMP </text:span><text:span text:style-name="T136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37"><text:span text:style-name="T174">Q9 </text:span><text:span text:style-name="T136">何者用 </text:span><text:span text:style-name="T174">UDP </text:span><text:span text:style-name="T136">且屬應用層？</text:span></text:p>
          </table:table-cell>
          <table:table-cell table:style-name="表格127.A2" office:value-type="string">
            <text:p text:style-name="P25" loext:marker-style-name="T137"><text:span text:style-name="T174">SNMP</text:span><text:span text:style-name="T137"/></text:p>
          </table:table-cell>
          <table:table-cell table:style-name="表格127.A2" office:value-type="string">
            <text:p text:style-name="P25" loext:marker-style-name="T137"><text:span text:style-name="T174">SNMP </text:span><text:span text:style-name="T136">用 </text:span><text:span text:style-name="T174">UDP</text:span><text:span text:style-name="T136">、屬應用層；</text:span><text:span text:style-name="T174">ICMP </text:span><text:span text:style-name="T136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37"><text:span text:style-name="T174">Q10 </text:span><text:span text:style-name="T136">下列何者正確？</text:span></text:p>
          </table:table-cell>
          <table:table-cell table:style-name="表格127.A3" office:value-type="string">
            <text:p text:style-name="P25" loext:marker-style-name="T137"><text:span text:style-name="T174">SNMP </text:span><text:span text:style-name="T136">用於設備管理</text:span></text:p>
          </table:table-cell>
          <table:table-cell table:style-name="表格127.A3" office:value-type="string">
            <text:p text:style-name="P25" loext:marker-style-name="T137"><text:span text:style-name="T174">IDS </text:span><text:span text:style-name="T136">不阻擋；</text:span><text:span text:style-name="T174">Firewall </text:span><text:span text:style-name="T136">不做行為分析；</text:span><text:span text:style-name="T174">ICMP </text:span><text:span text:style-name="T136">只做網路診斷。</text:span></text:p>
          </table:table-cell>
        </table:table-row>
      </table:table>
      <text:h text:style-name="P2" text:outline-level="2" loext:marker-style-name="T27"><text:span text:style-name="T28">肆、企業資訊安全：預防 → 偵測 → 復原</text:span><text:span text:style-name="T27"/></text:h>
      <text:p text:style-name="P32" loext:marker-style-name="T101"><text:span text:style-name="T99">企業資訊系統（官網、資料庫、公文</text:span><text:span text:style-name="T148">/</text:span><text:span text:style-name="T99">健保</text:span><text:span text:style-name="T148">/</text:span><text:span text:style-name="T99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6" loext:marker-style-name="T71"><text:span text:style-name="T70">三大核心</text:span><text:span text:style-name="T71"/></text:p>
            </table:table-cell>
            <table:table-cell table:style-name="表格128.A1" office:value-type="string">
              <text:p text:style-name="P6" loext:marker-style-name="T71"><text:span text:style-name="T70">目標</text:span><text:span text:style-name="T71"/></text:p>
            </table:table-cell>
            <table:table-cell table:style-name="表格128.A1" office:value-type="string">
              <text:p text:style-name="P6" loext:marker-style-name="T71"><text:span text:style-name="T70">做法</text:span><text:span text:style-name="T71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5" loext:marker-style-name="T129"><text:span text:style-name="T170">① </text:span><text:span text:style-name="T130">事前預防</text:span></text:p>
          </table:table-cell>
          <table:table-cell table:style-name="表格128.A2" office:value-type="string">
            <text:p text:style-name="P25" loext:marker-style-name="T129"><text:span text:style-name="T130">讓壞事不要發生</text:span><text:span text:style-name="T129"/></text:p>
          </table:table-cell>
          <table:table-cell table:style-name="表格128.A2" office:value-type="string">
            <text:p text:style-name="P25" loext:marker-style-name="T129"><text:span text:style-name="T130">設密碼、</text:span><text:span text:style-name="T170">MFA</text:span><text:span text:style-name="T130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5" loext:marker-style-name="T129"><text:span text:style-name="T170">② </text:span><text:span text:style-name="T130">事中偵測</text:span></text:p>
          </table:table-cell>
          <table:table-cell table:style-name="表格128.A3" office:value-type="string">
            <text:p text:style-name="P25" loext:marker-style-name="T129"><text:span text:style-name="T130">出事時盡快發現</text:span><text:span text:style-name="T129"/></text:p>
          </table:table-cell>
          <table:table-cell table:style-name="表格128.A3" office:value-type="string">
            <text:p text:style-name="P25" loext:marker-style-name="T129"><text:span text:style-name="T130">偵測異常登入、流量、病毒警報（</text:span><text:span text:style-name="T170">IDS/IPS/NGFW/EDR/MDR</text:span><text:span text:style-name="T130">）</text:span></text:p>
          </table:table-cell>
        </table:table-row>
        <table:table-row table:style-name="表格128.1">
          <table:table-cell table:style-name="表格128.A2" office:value-type="string">
            <text:p text:style-name="P25" loext:marker-style-name="T129"><text:span text:style-name="T170">③ </text:span><text:span text:style-name="T130">事後復原</text:span></text:p>
          </table:table-cell>
          <table:table-cell table:style-name="表格128.A2" office:value-type="string">
            <text:p text:style-name="P25" loext:marker-style-name="T129"><text:span text:style-name="T130">壞掉後快速救回來</text:span><text:span text:style-name="T129"/></text:p>
          </table:table-cell>
          <table:table-cell table:style-name="表格128.A2" office:value-type="string">
            <text:p text:style-name="P25" loext:marker-style-name="T129"><text:span text:style-name="T130">備份還原、啟動備援系統、災難復原（</text:span><text:span text:style-name="T170">BCP</text:span><text:span text:style-name="T130">、</text:span><text:span text:style-name="T170">RTO/RPO</text:span><text:span text:style-name="T130">）</text:span></text:p>
          </table:table-cell>
        </table:table-row>
      </table:table>
      <text:h text:style-name="P3" text:outline-level="3"><text:span text:style-name="T178">▍</text:span><text:span text:style-name="T179"> </text:span><text:span text:style-name="T180">事前預防：</text:span><text:span text:style-name="T179">MFA</text:span><text:span text:style-name="T180">（多因素驗證）</text:span></text:h>
      <text:p text:style-name="P32" loext:marker-style-name="T101"><text:span text:style-name="T148">MFA = Multi-Factor Authentication</text:span><text:span text:style-name="T99">。登入帳號時不只輸入密碼，還要再驗證一次身份：手機簡訊驗證碼、</text:span><text:span text:style-name="T148">Google Authenticator </text:span><text:span text:style-name="T99">動態碼、指紋或臉部辨識。為什麼要 </text:span><text:span text:style-name="T148">MFA</text:span><text:span text:style-name="T99">？即使駭客知道你的密碼，沒有你的手機或指紋，也無法登入。</text:span></text:p>
      <text:h text:style-name="P3" text:outline-level="3"><text:soft-page-break/><text:span text:style-name="T178">▍</text:span><text:span text:style-name="T179"> </text:span><text:span text:style-name="T180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6" loext:marker-style-name="T71"><text:span text:style-name="T70">工具</text:span><text:span text:style-name="T71"/></text:p>
            </table:table-cell>
            <table:table-cell table:style-name="表格129.A1" office:value-type="string">
              <text:p text:style-name="P6" loext:marker-style-name="T71"><text:span text:style-name="T70">全名 </text:span><text:span text:style-name="T76">/ </text:span><text:span text:style-name="T70">說明</text:span></text:p>
            </table:table-cell>
            <table:table-cell table:style-name="表格129.A1" office:value-type="string">
              <text:p text:style-name="P6" loext:marker-style-name="T71"><text:span text:style-name="T70">會阻擋？</text:span><text:span text:style-name="T71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5" loext:marker-style-name="T129"><text:span text:style-name="T170">Firewall</text:span><text:span text:style-name="T129"/></text:p>
          </table:table-cell>
          <table:table-cell table:style-name="表格129.A2" office:value-type="string">
            <text:p text:style-name="P25" loext:marker-style-name="T129"><text:span text:style-name="T130">控制誰能進出網路</text:span><text:span text:style-name="T129"/></text:p>
          </table:table-cell>
          <table:table-cell table:style-name="表格129.A2" office:value-type="string">
            <text:p text:style-name="P25" loext:marker-style-name="T129"><text:span text:style-name="T170">✔ </text:span><text:span text:style-name="T130">會</text:span></text:p>
          </table:table-cell>
        </table:table-row>
        <table:table-row table:style-name="表格129.1">
          <table:table-cell table:style-name="表格129.A3" office:value-type="string">
            <text:p text:style-name="P25" loext:marker-style-name="T129"><text:span text:style-name="T170">NGFW</text:span><text:span text:style-name="T129"/></text:p>
          </table:table-cell>
          <table:table-cell table:style-name="表格129.A3" office:value-type="string">
            <text:p text:style-name="P25" loext:marker-style-name="T129"><text:span text:style-name="T130">次世代防火牆，能辨識應用層威脅</text:span><text:span text:style-name="T129"/></text:p>
          </table:table-cell>
          <table:table-cell table:style-name="表格129.A3" office:value-type="string">
            <text:p text:style-name="P25" loext:marker-style-name="T129"><text:span text:style-name="T170">✔ </text:span><text:span text:style-name="T130">會</text:span></text:p>
          </table:table-cell>
        </table:table-row>
        <table:table-row table:style-name="表格129.1">
          <table:table-cell table:style-name="表格129.A2" office:value-type="string">
            <text:p text:style-name="P25" loext:marker-style-name="T129"><text:span text:style-name="T170">IDS</text:span><text:span text:style-name="T129"/></text:p>
          </table:table-cell>
          <table:table-cell table:style-name="表格129.A2" office:value-type="string">
            <text:p text:style-name="P25" loext:marker-style-name="T129"><text:span text:style-name="T130">入侵偵測系統，發現異常就發警報</text:span><text:span text:style-name="T129"/></text:p>
          </table:table-cell>
          <table:table-cell table:style-name="表格129.A2" office:value-type="string">
            <text:p text:style-name="P25" loext:marker-style-name="T129"><text:span text:style-name="T170">✘ </text:span><text:span text:style-name="T130">不會</text:span></text:p>
          </table:table-cell>
        </table:table-row>
        <table:table-row table:style-name="表格129.1">
          <table:table-cell table:style-name="表格129.A3" office:value-type="string">
            <text:p text:style-name="P25" loext:marker-style-name="T129"><text:span text:style-name="T170">IPS</text:span><text:span text:style-name="T129"/></text:p>
          </table:table-cell>
          <table:table-cell table:style-name="表格129.A3" office:value-type="string">
            <text:p text:style-name="P25" loext:marker-style-name="T129"><text:span text:style-name="T130">入侵防禦系統，發現異常直接阻擋</text:span><text:span text:style-name="T129"/></text:p>
          </table:table-cell>
          <table:table-cell table:style-name="表格129.A3" office:value-type="string">
            <text:p text:style-name="P25" loext:marker-style-name="T129"><text:span text:style-name="T170">✔ </text:span><text:span text:style-name="T130">會</text:span></text:p>
          </table:table-cell>
        </table:table-row>
        <table:table-row table:style-name="表格129.1">
          <table:table-cell table:style-name="表格129.A2" office:value-type="string">
            <text:p text:style-name="P25" loext:marker-style-name="T129"><text:span text:style-name="T170">EDR</text:span><text:span text:style-name="T129"/></text:p>
          </table:table-cell>
          <table:table-cell table:style-name="表格129.A2" office:value-type="string">
            <text:p text:style-name="P25" loext:marker-style-name="T129"><text:span text:style-name="T170">Endpoint Detection &amp; Response</text:span><text:span text:style-name="T130">，監控每台電腦行為</text:span></text:p>
          </table:table-cell>
          <table:table-cell table:style-name="表格129.A2" office:value-type="string">
            <text:p text:style-name="P25" loext:marker-style-name="T129"><text:span text:style-name="T170">✔ </text:span><text:span text:style-name="T130">會</text:span></text:p>
          </table:table-cell>
        </table:table-row>
        <table:table-row table:style-name="表格129.1">
          <table:table-cell table:style-name="表格129.A3" office:value-type="string">
            <text:p text:style-name="P25" loext:marker-style-name="T129"><text:span text:style-name="T170">MDR</text:span><text:span text:style-name="T129"/></text:p>
          </table:table-cell>
          <table:table-cell table:style-name="表格129.A3" office:value-type="string">
            <text:p text:style-name="P25" loext:marker-style-name="T129"><text:span text:style-name="T170">Managed D&amp;R</text:span><text:span text:style-name="T130">，委外資安監控服務（</text:span><text:span text:style-name="T170">24 </text:span><text:span text:style-name="T130">小時）</text:span></text:p>
          </table:table-cell>
          <table:table-cell table:style-name="表格129.A3" office:value-type="string">
            <text:p text:style-name="P25" loext:marker-style-name="T129"><text:span text:style-name="T170">✔ </text:span><text:span text:style-name="T130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8"><text:span text:style-name="T176">🏠 <text:s/></text:span><text:span text:style-name="T47">比喻幫你秒懂（公司＝大樓）</text:span></text:p>
            <text:p text:style-name="P9" loext:marker-style-name="T101"><text:span text:style-name="T99">防火牆＝社區大門警衛；</text:span><text:span text:style-name="T148">NGFW</text:span><text:span text:style-name="T99">＝更聰明的警衛（還會看你帶什麼東西進來）；</text:span><text:span text:style-name="T148">IDS</text:span><text:span text:style-name="T99">＝監視器警報（只會叫，不會阻止）；</text:span><text:span text:style-name="T148">IPS</text:span><text:span text:style-name="T99">＝保全（直接壓制壞人）；</text:span><text:span text:style-name="T148">EDR</text:span><text:span text:style-name="T99">＝每個房間都裝攝影機（監控每台電腦</text:span><text:span text:style-name="T148">/</text:span><text:span text:style-name="T99">程式）；</text:span><text:span text:style-name="T148">MDR</text:span><text:span text:style-name="T99">＝把保全工作委外給專業公司 </text:span><text:span text:style-name="T148">24 </text:span><text:span text:style-name="T99">小時監控。</text:span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</text:span><text:span text:style-name="T180">事後復原：備份、</text:span><text:span text:style-name="T179">RTO / RPO</text:span><text:span text:style-name="T180">、</text:span><text:span text:style-name="T179">BCP</text:span></text:h>
      <text:p text:style-name="P32" loext:marker-style-name="T101"><text:span text:style-name="T99">當資料損毀或遭加密（如勒索病毒），可透過備份救回。最佳實踐：本地備份 </text:span><text:span text:style-name="T148">+ </text:span><text:span text:style-name="T99">異地備份（台北機房同步到高雄機房）；定期測試「備份能否真的還原」；雲端備份（</text:span><text:span text:style-name="T148">AWS/Azure/GCP</text:span><text:span text:style-name="T99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6" loext:marker-style-name="T71"><text:span text:style-name="T70">指標</text:span><text:span text:style-name="T71"/></text:p>
            </table:table-cell>
            <table:table-cell table:style-name="表格130.A1" office:value-type="string">
              <text:p text:style-name="P6" loext:marker-style-name="T71"><text:span text:style-name="T70">全名</text:span><text:span text:style-name="T71"/></text:p>
            </table:table-cell>
            <table:table-cell table:style-name="表格130.A1" office:value-type="string">
              <text:p text:style-name="P6" loext:marker-style-name="T71"><text:span text:style-name="T70">問什麼</text:span><text:span text:style-name="T71"/></text:p>
            </table:table-cell>
            <table:table-cell table:style-name="表格130.A1" office:value-type="string">
              <text:p text:style-name="P6" loext:marker-style-name="T71"><text:span text:style-name="T70">範例</text:span><text:span text:style-name="T71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5" loext:marker-style-name="T129"><text:span text:style-name="T170">RTO</text:span><text:span text:style-name="T129"/></text:p>
          </table:table-cell>
          <table:table-cell table:style-name="表格130.A2" office:value-type="string">
            <text:p text:style-name="P25" loext:marker-style-name="T129"><text:span text:style-name="T170">Recovery Time Objective </text:span><text:span text:style-name="T130">復原時間目標</text:span></text:p>
          </table:table-cell>
          <table:table-cell table:style-name="表格130.A2" office:value-type="string">
            <text:p text:style-name="P25" loext:marker-style-name="T129"><text:span text:style-name="T130">系統出問題後，最多能停多久？</text:span><text:span text:style-name="T129"/></text:p>
          </table:table-cell>
          <table:table-cell table:style-name="表格130.A2" office:value-type="string">
            <text:p text:style-name="P25" loext:marker-style-name="T129"><text:span text:style-name="T130">銀行 </text:span><text:span text:style-name="T170">RTO 10 </text:span><text:span text:style-name="T130">分鐘；學校網站 </text:span><text:span text:style-name="T170">RTO </text:span><text:span text:style-name="T130">半天</text:span></text:p>
          </table:table-cell>
        </table:table-row>
        <table:table-row table:style-name="表格130.1">
          <table:table-cell table:style-name="表格130.A3" office:value-type="string">
            <text:p text:style-name="P25" loext:marker-style-name="T129"><text:span text:style-name="T170">RPO</text:span><text:span text:style-name="T129"/></text:p>
          </table:table-cell>
          <table:table-cell table:style-name="表格130.A3" office:value-type="string">
            <text:p text:style-name="P25" loext:marker-style-name="T129"><text:span text:style-name="T170">Recovery Point Objective </text:span><text:span text:style-name="T130">復原點目標</text:span></text:p>
          </table:table-cell>
          <table:table-cell table:style-name="表格130.A3" office:value-type="string">
            <text:p text:style-name="P25" loext:marker-style-name="T129"><text:span text:style-name="T130">最多能接受丟失幾小時的資料？</text:span><text:span text:style-name="T129"/></text:p>
          </table:table-cell>
          <table:table-cell table:style-name="表格130.A3" office:value-type="string">
            <text:p text:style-name="P25" loext:marker-style-name="T129"><text:span text:style-name="T130">銀行 </text:span><text:span text:style-name="T170">RPO </text:span><text:span text:style-name="T130">接近 </text:span><text:span text:style-name="T170">0</text:span><text:span text:style-name="T130">；一般公司 </text:span><text:span text:style-name="T170">RPO 24 </text:span><text:span text:style-name="T130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8"><text:span text:style-name="T176">⏱ <text:s/></text:span><text:span text:style-name="T226">一句話記憶法</text:span></text:p>
            <text:p text:style-name="P9"><text:span text:style-name="T233">RTO = </text:span><text:span text:style-name="T227">停機時間</text:span><text:span text:style-name="T99">（能停多久？）　</text:span><text:span text:style-name="T233">RPO = </text:span><text:span text:style-name="T227">資料損失量</text:span><text:span text:style-name="T9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8"><text:span text:style-name="T176">🏢 <text:s/></text:span><text:span text:style-name="T58">BCP</text:span><text:span text:style-name="T47">：公司炸掉了還能繼續運作嗎？</text:span></text:p>
            <text:p text:style-name="P9" loext:marker-style-name="T101"><text:span text:style-name="T148">BCP = Business Continuity Planning</text:span><text:span text:style-name="T99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SSDLC</text:span><text:span text:style-name="T180">：軟體開發的每個階段都加入資安</text:span></text:h>
      <text:p text:style-name="P32" loext:marker-style-name="T101"><text:span text:style-name="T148">SSDLC = Security Software Development Life Cycle</text:span><text:span text:style-name="T99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6" loext:marker-style-name="T71"><text:span text:style-name="T70">階段</text:span><text:span text:style-name="T71"/></text:p>
            </table:table-cell>
            <table:table-cell table:style-name="表格131.A1" office:value-type="string">
              <text:p text:style-name="P6" loext:marker-style-name="T71"><text:span text:style-name="T70">英文</text:span><text:span text:style-name="T71"/></text:p>
            </table:table-cell>
            <table:table-cell table:style-name="表格131.A1" office:value-type="string">
              <text:p text:style-name="P6" loext:marker-style-name="T71"><text:span text:style-name="T70">做什麼</text:span><text:span text:style-name="T71"/></text:p>
            </table:table-cell>
            <table:table-cell table:style-name="表格131.A1" office:value-type="string">
              <text:p text:style-name="P6" loext:marker-style-name="T71"><text:span text:style-name="T70">資安重點</text:span><text:span text:style-name="T71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5" loext:marker-style-name="T129"><text:span text:style-name="T170">① </text:span><text:span text:style-name="T130">定義</text:span></text:p>
          </table:table-cell>
          <table:table-cell table:style-name="表格131.A2" office:value-type="string">
            <text:p text:style-name="P25" loext:marker-style-name="T129"><text:span text:style-name="T170">Define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確認需求與範圍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列出安全需求（需要登入驗證嗎？）</text:span><text:span text:style-name="T129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29"><text:span text:style-name="T170">② </text:span><text:span text:style-name="T130">設計</text:span></text:p>
          </table:table-cell>
          <table:table-cell table:style-name="表格131.A3" office:value-type="string">
            <text:p text:style-name="P25" loext:marker-style-name="T129"><text:span text:style-name="T170">Design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設計系統架構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規劃權限控管、密碼加密、防 </text:span><text:span text:style-name="T170">SQL Injection</text:span></text:p>
          </table:table-cell>
        </table:table-row>
        <table:table-row table:style-name="表格131.1">
          <table:table-cell table:style-name="表格131.A2" office:value-type="string">
            <text:p text:style-name="P25" loext:marker-style-name="T129"><text:span text:style-name="T170">③ </text:span><text:span text:style-name="T130">開發</text:span></text:p>
          </table:table-cell>
          <table:table-cell table:style-name="表格131.A2" office:value-type="string">
            <text:p text:style-name="P25" loext:marker-style-name="T129"><text:span text:style-name="T170">Develop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工程師寫程式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遵守安全編碼規範，不寫危險程式碼</text:span><text:span text:style-name="T129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29"><text:span text:style-name="T170">④ </text:span><text:span text:style-name="T130">測試</text:span></text:p>
          </table:table-cell>
          <table:table-cell table:style-name="表格131.A3" office:value-type="string">
            <text:p text:style-name="P25" loext:marker-style-name="T129"><text:span text:style-name="T170">Test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測試功能與安全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弱點掃描、滲透測試，找出漏洞</text:span><text:span text:style-name="T129"/></text:p>
          </table:table-cell>
        </table:table-row>
        <table:table-row table:style-name="表格131.1">
          <table:table-cell table:style-name="表格131.A2" office:value-type="string">
            <text:p text:style-name="P25" loext:marker-style-name="T129"><text:span text:style-name="T170">⑤ </text:span><text:span text:style-name="T130">上線</text:span></text:p>
          </table:table-cell>
          <table:table-cell table:style-name="表格131.A2" office:value-type="string">
            <text:p text:style-name="P25" loext:marker-style-name="T129"><text:span text:style-name="T170">Deploy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正式發布系統</text:span><text:span text:style-name="T129"/></text:p>
          </table:table-cell>
          <table:table-cell table:style-name="表格131.A2" office:value-type="string">
            <text:p text:style-name="P25" loext:marker-style-name="T129"><text:span text:style-name="T130">確認設定沒疏漏，最小權限原則</text:span><text:span text:style-name="T129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29"><text:span text:style-name="T170">⑥ </text:span><text:span text:style-name="T130">維護</text:span></text:p>
          </table:table-cell>
          <table:table-cell table:style-name="表格131.A3" office:value-type="string">
            <text:p text:style-name="P25" loext:marker-style-name="T129"><text:span text:style-name="T170">Maintain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持續監控與更新</text:span><text:span text:style-name="T129"/></text:p>
          </table:table-cell>
          <table:table-cell table:style-name="表格131.A3" office:value-type="string">
            <text:p text:style-name="P25" loext:marker-style-name="T129"><text:span text:style-name="T130">定期更新修補，監控異常行為</text:span><text:span text:style-name="T129"/>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8"><text:span text:style-name="T176">🔑 <text:s/></text:span><text:span text:style-name="T190">SSDLC </text:span><text:span text:style-name="T180">核心</text:span></text:p>
            <text:p text:style-name="P9" loext:marker-style-name="T101"><text:span text:style-name="T99">核心精神「左移（</text:span><text:span text:style-name="T148">Shift Left</text:span><text:span text:style-name="T99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78">▍</text:span><text:span text:style-name="T179"> ISO 27001</text:span><text:span text:style-name="T180">：用制度管理資安</text:span></text:h>
      <text:p text:style-name="P32" loext:marker-style-name="T101"><text:span text:style-name="T148">ISO 27001 </text:span><text:span text:style-name="T99">是國際公認的資安管理制度標準，建立的制度稱為 </text:span><text:span text:style-name="T148">ISMS</text:span><text:span text:style-name="T99">（</text:span><text:span text:style-name="T148">Information Security Management System</text:span><text:span text:style-name="T99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6" loext:marker-style-name="T71"><text:span text:style-name="T70">四個面向</text:span><text:span text:style-name="T71"/></text:p>
            </table:table-cell>
            <table:table-cell table:style-name="表格132.A1" office:value-type="string">
              <text:p text:style-name="P6" loext:marker-style-name="T71"><text:span text:style-name="T70">管什麼</text:span><text:span text:style-name="T71"/></text:p>
            </table:table-cell>
            <table:table-cell table:style-name="表格132.A1" office:value-type="string">
              <text:p text:style-name="P6" loext:marker-style-name="T71"><text:span text:style-name="T70">例子</text:span><text:span text:style-name="T71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5" loext:marker-style-name="T129"><text:span text:style-name="T130">人（</text:span><text:span text:style-name="T170">People</text:span><text:span text:style-name="T130">）</text:span></text:p>
          </table:table-cell>
          <table:table-cell table:style-name="表格132.A2" office:value-type="string">
            <text:p text:style-name="P25" loext:marker-style-name="T129"><text:span text:style-name="T130">管理人員的行為與責任</text:span><text:span text:style-name="T129"/></text:p>
          </table:table-cell>
          <table:table-cell table:style-name="表格132.A2" office:value-type="string">
            <text:p text:style-name="P25" loext:marker-style-name="T129"><text:span text:style-name="T130">員工教育訓練、離職員工帳號立即停用、權限最小化</text:span><text:span text:style-name="T129"/></text:p>
          </table:table-cell>
        </table:table-row>
        <table:table-row table:style-name="表格132.1">
          <table:table-cell table:style-name="表格132.A3" office:value-type="string">
            <text:p text:style-name="P25" loext:marker-style-name="T129"><text:span text:style-name="T130">技術（</text:span><text:span text:style-name="T170">Technology</text:span><text:span text:style-name="T130">）</text:span></text:p>
          </table:table-cell>
          <table:table-cell table:style-name="表格132.A3" office:value-type="string">
            <text:p text:style-name="P25" loext:marker-style-name="T129"><text:span text:style-name="T130">使用適當的安全技術</text:span><text:span text:style-name="T129"/></text:p>
          </table:table-cell>
          <table:table-cell table:style-name="表格132.A3" office:value-type="string">
            <text:p text:style-name="P25" loext:marker-style-name="T129"><text:span text:style-name="T130">防火牆、</text:span><text:span text:style-name="T170">MFA</text:span><text:span text:style-name="T130">、資料加密、</text:span><text:span text:style-name="T170">EDR</text:span></text:p>
          </table:table-cell>
        </table:table-row>
        <table:table-row table:style-name="表格132.1">
          <table:table-cell table:style-name="表格132.A2" office:value-type="string">
            <text:p text:style-name="P25" loext:marker-style-name="T129"><text:span text:style-name="T130">組織（</text:span><text:span text:style-name="T170">Organization</text:span><text:span text:style-name="T130">）</text:span></text:p>
          </table:table-cell>
          <table:table-cell table:style-name="表格132.A2" office:value-type="string">
            <text:p text:style-name="P25" loext:marker-style-name="T129"><text:span text:style-name="T130">建立流程與管理制度</text:span><text:span text:style-name="T129"/></text:p>
          </table:table-cell>
          <table:table-cell table:style-name="表格132.A2" office:value-type="string">
            <text:p text:style-name="P25" loext:marker-style-name="T129"><text:span text:style-name="T130">資安政策、</text:span><text:span text:style-name="T170">SOP</text:span><text:span text:style-name="T130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5" loext:marker-style-name="T129"><text:span text:style-name="T130">實體（</text:span><text:span text:style-name="T170">Physical</text:span><text:span text:style-name="T130">）</text:span></text:p>
          </table:table-cell>
          <table:table-cell table:style-name="表格132.A3" office:value-type="string">
            <text:p text:style-name="P25" loext:marker-style-name="T129"><text:span text:style-name="T130">保護實體環境</text:span><text:span text:style-name="T129"/></text:p>
          </table:table-cell>
          <table:table-cell table:style-name="表格132.A3" office:value-type="string">
            <text:p text:style-name="P25" loext:marker-style-name="T129"><text:span text:style-name="T130">機房門禁、監視器、防止未授權人員進入</text:span><text:span text:style-name="T129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8"><text:span text:style-name="T176">🌟 <text:s/></text:span><text:span text:style-name="T226">考試必背三句話</text:span></text:p>
            <text:p text:style-name="P9" loext:marker-style-name="T101"><text:span text:style-name="T148">1. </text:span><text:span text:style-name="T99">資安三階段：事前預防 → 事中偵測 → 事後復原。</text:span></text:p>
            <text:p text:style-name="P10" loext:marker-style-name="T101"><text:span text:style-name="T148">2. SSDLC</text:span><text:span text:style-name="T99">：六階段（</text:span><text:span text:style-name="T148">Define→Design→Develop→Test→Deploy→Maintain</text:span><text:span text:style-name="T99">）都加入資安。</text:span></text:p>
            <text:p text:style-name="P10" loext:marker-style-name="T101"><text:span text:style-name="T148">3. ISO 27001</text:span><text:span text:style-name="T99">：用 </text:span><text:span text:style-name="T148">ISMS </text:span><text:span text:style-name="T99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2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32" loext:marker-style-name="T101"><text:span text:style-name="T99">現代駭客不一定放病毒，而是偷登入帳號偽裝成正常使用者、長期潛伏、利用合法工具發動攻擊。因此資安核心已從「防毒」轉向「持續監控電腦行為，即時偵測並快速應變」。</text:span><text:span text:style-name="T101"/></text:p>
      <text:h text:style-name="P3" text:outline-level="3"><text:span text:style-name="T178">▍</text:span><text:span text:style-name="T179"> EDR — </text:span><text:span text:style-name="T180">自己監控的資安工具</text:span></text:h>
      <text:p text:style-name="P32" loext:marker-style-name="T101"><text:span text:style-name="T148">EDR = Endpoint Detection and Response</text:span><text:span text:style-name="T99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2" loext:marker-style-name="T65"><text:span text:style-name="T64">三大偵測範圍</text:span><text:span text:style-name="T65"/></text:p>
            </table:table-cell>
            <table:table-cell table:style-name="表格133.A1" office:value-type="string">
              <text:p text:style-name="P22" loext:marker-style-name="T65"><text:span text:style-name="T64">三大回應動作</text:span><text:span text:style-name="T65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5" loext:marker-style-name="T78"><text:span text:style-name="T77">檔案行為：大量加密</text:span><text:span text:style-name="T138">/</text:span><text:span text:style-name="T77">修改系統檔案 → 可能勒索病毒｜程式行為：</text:span><text:span text:style-name="T138">Office </text:span><text:span text:style-name="T77">偷偷開命令列 → 明顯異常｜網路行為：突然連線境外 </text:span><text:span text:style-name="T138">IP → </text:span><text:span text:style-name="T77">可能已遭入侵</text:span></text:p>
          </table:table-cell>
          <table:table-cell table:style-name="表格133.A2" office:value-type="string">
            <text:p text:style-name="P25" loext:marker-style-name="T78"><text:span text:style-name="T77">中斷程序：立即殺掉可疑惡意程式｜隔離主機：切斷該電腦與內網連線，防擴散｜封鎖連線：禁止與駭客伺服器通訊</text:span><text:span text:style-name="T78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8"><text:span text:style-name="T176">💡 <text:s/></text:span><text:span text:style-name="T180">核心觀念</text:span></text:p>
            <text:p text:style-name="P9" loext:marker-style-name="T101"><text:span text:style-name="T148">EDR </text:span><text:span text:style-name="T99">是「買工具、自己守」。企業需要有內部資安人員負責查看警報並處理事件。</text:span></text:p>
          </table:table-cell>
          <table:covered-table-cell/>
        </table:table-row>
      </table:table>
      <text:h text:style-name="P3" text:outline-level="3"><text:span text:style-name="T178">▍</text:span><text:span text:style-name="T179"> MDR — </text:span><text:span text:style-name="T180">委外的資安託管服務</text:span></text:h>
      <text:p text:style-name="P32" loext:marker-style-name="T101"><text:span text:style-name="T148">MDR = Managed Detection and Response</text:span><text:span text:style-name="T99">。重點在「</text:span><text:span text:style-name="T148">Managed</text:span><text:span text:style-name="T99">（託管）」——你不需要自己有資安團隊，直接花錢請外部資安公司 </text:span><text:span text:style-name="T148">24 </text:span><text:span text:style-name="T99">小時幫你守。服務包含 </text:span><text:span text:style-name="T148">SOC</text:span><text:span text:style-name="T99">（資安監控中心，專業人員 </text:span><text:span text:style-name="T148">24 </text:span><text:span text:style-name="T99">小時盯著）、</text:span><text:span text:style-name="T148">IDS</text:span><text:span text:style-name="T99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6" loext:marker-style-name="T65"><text:span text:style-name="T64">比較項目</text:span><text:span text:style-name="T65"/></text:p>
            </table:table-cell>
            <table:table-cell table:style-name="表格134.A1" office:value-type="string">
              <text:p text:style-name="P6" loext:marker-style-name="T65"><text:span text:style-name="T74">EDR</text:span><text:span text:style-name="T65"/></text:p>
            </table:table-cell>
            <table:table-cell table:style-name="表格134.A1" office:value-type="string">
              <text:p text:style-name="P6" loext:marker-style-name="T65"><text:span text:style-name="T74">MDR</text:span><text:span text:style-name="T65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5" loext:marker-style-name="T78"><text:span text:style-name="T77">管理方式</text:span><text:span text:style-name="T78"/></text:p>
          </table:table-cell>
          <table:table-cell table:style-name="表格134.A2" office:value-type="string">
            <text:p text:style-name="P25" loext:marker-style-name="T78"><text:span text:style-name="T77">自行管理</text:span><text:span text:style-name="T78"/></text:p>
          </table:table-cell>
          <table:table-cell table:style-name="表格134.A2" office:value-type="string">
            <text:p text:style-name="P25" loext:marker-style-name="T78"><text:span text:style-name="T77">委外管理</text:span><text:span text:style-name="T78"/></text:p>
          </table:table-cell>
        </table:table-row>
        <table:table-row table:style-name="表格134.1">
          <table:table-cell table:style-name="表格134.A3" office:value-type="string">
            <text:p text:style-name="P25" loext:marker-style-name="T78"><text:span text:style-name="T77">監控時間</text:span><text:span text:style-name="T78"/></text:p>
          </table:table-cell>
          <table:table-cell table:style-name="表格134.A3" office:value-type="string">
            <text:p text:style-name="P25" loext:marker-style-name="T78"><text:span text:style-name="T77">視團隊而定</text:span><text:span text:style-name="T78"/></text:p>
          </table:table-cell>
          <table:table-cell table:style-name="表格134.A3" office:value-type="string">
            <text:p text:style-name="P25" loext:marker-style-name="T78"><text:span text:style-name="T138">24 / 7 </text:span><text:span text:style-name="T77">全天</text:span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5" loext:marker-style-name="T78"><text:span text:style-name="T77">所需能力</text:span><text:span text:style-name="T78"/></text:p>
          </table:table-cell>
          <table:table-cell table:style-name="表格134.A2" office:value-type="string">
            <text:p text:style-name="P25" loext:marker-style-name="T78"><text:span text:style-name="T77">需內部資安人員</text:span><text:span text:style-name="T78"/></text:p>
          </table:table-cell>
          <table:table-cell table:style-name="表格134.A2" office:value-type="string">
            <text:p text:style-name="P25" loext:marker-style-name="T78"><text:span text:style-name="T77">無須自建團隊</text:span><text:span text:style-name="T78"/></text:p>
          </table:table-cell>
        </table:table-row>
        <table:table-row table:style-name="表格134.1">
          <table:table-cell table:style-name="表格134.A3" office:value-type="string">
            <text:p text:style-name="P25" loext:marker-style-name="T78"><text:span text:style-name="T77">適合對象</text:span><text:span text:style-name="T78"/></text:p>
          </table:table-cell>
          <table:table-cell table:style-name="表格134.A3" office:value-type="string">
            <text:p text:style-name="P25" loext:marker-style-name="T78"><text:span text:style-name="T77">大型企業</text:span><text:span text:style-name="T78"/></text:p>
          </table:table-cell>
          <table:table-cell table:style-name="表格134.A3" office:value-type="string">
            <text:p text:style-name="P25" loext:marker-style-name="T78"><text:span text:style-name="T77">中小企業</text:span><text:span text:style-name="T78"/></text:p>
          </table:table-cell>
        </table:table-row>
        <table:table-row table:style-name="表格134.1">
          <table:table-cell table:style-name="表格134.A2" office:value-type="string">
            <text:p text:style-name="P25" loext:marker-style-name="T78"><text:span text:style-name="T77">成本模式</text:span><text:span text:style-name="T78"/></text:p>
          </table:table-cell>
          <table:table-cell table:style-name="表格134.A2" office:value-type="string">
            <text:p text:style-name="P25" loext:marker-style-name="T78"><text:span text:style-name="T77">工具費 </text:span><text:span text:style-name="T138">+ </text:span><text:span text:style-name="T77">人力</text:span></text:p>
          </table:table-cell>
          <table:table-cell table:style-name="表格134.A2" office:value-type="string">
            <text:p text:style-name="P25" loext:marker-style-name="T78"><text:span text:style-name="T77">月費 </text:span><text:span text:style-name="T138">/ </text:span><text:span text:style-name="T77">年費訂閱</text:span></text:p>
          </table:table-cell>
        </table:table-row>
      </table:table>
      <text:h text:style-name="P3" text:outline-level="3"><text:span text:style-name="T178">▍</text:span><text:span text:style-name="T179"> MITRE ATT&amp;CK — </text:span><text:span text:style-name="T180">駭客招式大全</text:span></text:h>
      <text:p text:style-name="P32" loext:marker-style-name="T101"><text:span text:style-name="T99">資安界發現駭客攻擊模式相當固定（寄釣魚信→偷帳號→開後門→橫向移動→竊取資料）。</text:span><text:span text:style-name="T148">MITRE </text:span><text:span text:style-name="T99">公司將所有已知駭客手法整理成全球通用的知識庫，稱為 </text:span><text:span text:style-name="T148">MITRE ATT&amp;CK</text:span><text:span text:style-name="T99">（</text:span><text:span text:style-name="T148">Adversarial Tactics, Techniques, and Common Knowledge</text:span><text:span text:style-name="T99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6" loext:marker-style-name="T71"><text:span text:style-name="T76">TTP</text:span><text:span text:style-name="T71"/></text:p>
            </table:table-cell>
            <table:table-cell table:style-name="表格135.A1" office:value-type="string">
              <text:p text:style-name="P6" loext:marker-style-name="T71"><text:span text:style-name="T70">意義</text:span><text:span text:style-name="T71"/></text:p>
            </table:table-cell>
            <table:table-cell table:style-name="表格135.A1" office:value-type="string">
              <text:p text:style-name="P6" loext:marker-style-name="T71"><text:span text:style-name="T76">ATT&amp;CK </text:span><text:span text:style-name="T70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5" loext:marker-style-name="T129"><text:span text:style-name="T170">T - Tactics</text:span><text:span text:style-name="T129"/></text:p>
          </table:table-cell>
          <table:table-cell table:style-name="表格135.A2" office:value-type="string">
            <text:p text:style-name="P25" loext:marker-style-name="T129"><text:span text:style-name="T130">戰術（攻擊目的）</text:span><text:span text:style-name="T129"/></text:p>
          </table:table-cell>
          <table:table-cell table:style-name="表格135.A2" office:value-type="string">
            <text:p text:style-name="P25" loext:marker-style-name="T129"><text:span text:style-name="T130">威脅分析：快速定性事件性質</text:span><text:span text:style-name="T129"/></text:p>
          </table:table-cell>
        </table:table-row>
        <table:table-row table:style-name="表格135.1">
          <table:table-cell table:style-name="表格135.A3" office:value-type="string">
            <text:p text:style-name="P25" loext:marker-style-name="T129"><text:span text:style-name="T170">T - Techniques</text:span><text:span text:style-name="T129"/></text:p>
          </table:table-cell>
          <table:table-cell table:style-name="表格135.A3" office:value-type="string">
            <text:p text:style-name="P25" loext:marker-style-name="T129"><text:span text:style-name="T130">技術（使用方法）</text:span><text:span text:style-name="T129"/></text:p>
          </table:table-cell>
          <table:table-cell table:style-name="表格135.A3" office:value-type="string">
            <text:p text:style-name="P25" loext:marker-style-name="T129"><text:span text:style-name="T130">防禦對應：針對常見手法加強監控</text:span><text:span text:style-name="T129"/></text:p>
          </table:table-cell>
        </table:table-row>
        <table:table-row table:style-name="表格135.1">
          <table:table-cell table:style-name="表格135.A2" office:value-type="string">
            <text:p text:style-name="P25" loext:marker-style-name="T129"><text:span text:style-name="T170">P - Procedures</text:span><text:span text:style-name="T129"/></text:p>
          </table:table-cell>
          <table:table-cell table:style-name="表格135.A2" office:value-type="string">
            <text:p text:style-name="P25" loext:marker-style-name="T129"><text:span text:style-name="T130">流程（實際操作步驟）</text:span><text:span text:style-name="T129"/></text:p>
          </table:table-cell>
          <table:table-cell table:style-name="表格135.A2" office:value-type="string">
            <text:p text:style-name="P25" loext:marker-style-name="T129"><text:span text:style-name="T130">主動防禦：預測下一步，提前部署</text:span><text:span text:style-name="T129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8"><text:span text:style-name="T176">💡 <text:s/></text:span><text:span text:style-name="T180">核心觀念</text:span></text:p>
            <text:p text:style-name="P9" loext:marker-style-name="T101"><text:span text:style-name="T148">ATT&amp;CK </text:span><text:span text:style-name="T99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</text:span><text:span text:style-name="T180">數位韌性（</text:span><text:span text:style-name="T179">Digital Resilience</text:span><text:span text:style-name="T180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2" loext:marker-style-name="T65"><text:span text:style-name="T74">❌ </text:span><text:span text:style-name="T64">以前的想法</text:span></text:p>
            </table:table-cell>
            <table:table-cell table:style-name="表格136.A1" office:value-type="string">
              <text:p text:style-name="P22" loext:marker-style-name="T65"><text:span text:style-name="T74">✅ </text:span><text:span text:style-name="T64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5" loext:marker-style-name="T78"><text:span text:style-name="T77">「不能被攻擊」——重點：阻止所有入侵。</text:span><text:span text:style-name="T78"/></text:p>
          </table:table-cell>
          <table:table-cell table:style-name="表格136.A2" office:value-type="string">
            <text:p text:style-name="P25" loext:marker-style-name="T78"><text:span text:style-name="T77">「被打了還能撐住並快速恢復」——重點：強化復原能力。</text:span><text:span text:style-name="T78"/></text:p>
          </table:table-cell>
        </table:table-row>
      </table:table>
      <text:p text:style-name="P32" loext:marker-style-name="T11"><text:span text:style-name="T1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1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8"><text:span text:style-name="T176">📝 <text:s/></text:span><text:span text:style-name="T226">一行記憶法</text:span></text:p>
            <text:p text:style-name="P9"><text:span text:style-name="T233">🛡 EDR → </text:span><text:span text:style-name="T99">自己買工具守　</text:span><text:span text:style-name="T227">👥 </text:span><text:span text:style-name="T233">MDR → </text:span><text:span text:style-name="T99">請公司幫你守</text:span></text:p>
            <text:p text:style-name="P10"><text:span text:style-name="T233">📖 ATT&amp;CK → </text:span><text:span text:style-name="T99">駭客招式教材　</text:span><text:span text:style-name="T227">💪 韌性 → </text:span><text:span text:style-name="T99">撐住、快速復原</text:span></text:p>
          </table:table-cell>
        </table:table-row>
      </table:table>
      <text:h text:style-name="P2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8"><text:span text:style-name="T176">📋 <text:s/></text:span><text:span text:style-name="T198">內容審查說明</text:span></text:p>
            <text:p text:style-name="P9" loext:marker-style-name="T101"><text:span text:style-name="T99">文中「三要素（身份</text:span><text:span text:style-name="T148">/</text:span><text:span text:style-name="T99">設備</text:span><text:span text:style-name="T148">/</text:span><text:span text:style-name="T99">情境）」源自 </text:span><text:span text:style-name="T148">Microsoft </text:span><text:span text:style-name="T99">的 </text:span><text:span text:style-name="T148">Zero Trust </text:span><text:span text:style-name="T99">簡化說法；</text:span><text:span text:style-name="T148">NIST SP 800-207 </text:span><text:span text:style-name="T99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32" loext:marker-style-name="T101"><text:span text:style-name="T99">傳統企業網路以「邊界防護」為核心，邊界之內的人員與設備幾乎被預設為可信任（城堡思維）。</text:span><text:span text:style-name="T148">Zero Trust </text:span><text:span text:style-name="T99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6" loext:marker-style-name="T65"><text:span text:style-name="T64">傳統（城堡思維）</text:span><text:span text:style-name="T65"/></text:p>
            </table:table-cell>
            <table:table-cell table:style-name="表格139.A1" office:value-type="string">
              <text:p text:style-name="P6" loext:marker-style-name="T65"><text:span text:style-name="T74">Zero Trust</text:span><text:span text:style-name="T65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5" loext:marker-style-name="T78"><text:span text:style-name="T77">核心假設</text:span><text:span text:style-name="T78"/></text:p>
          </table:table-cell>
          <table:table-cell table:style-name="表格139.A2" office:value-type="string">
            <text:p text:style-name="P25" loext:marker-style-name="T78"><text:span text:style-name="T77">內網 </text:span><text:span text:style-name="T138">= </text:span><text:span text:style-name="T77">可信任</text:span></text:p>
          </table:table-cell>
          <table:table-cell table:style-name="表格139.A2" office:value-type="string">
            <text:p text:style-name="P25" loext:marker-style-name="T78"><text:span text:style-name="T77">任何人都需持續驗證</text:span><text:span text:style-name="T78"/></text:p>
          </table:table-cell>
        </table:table-row>
        <table:table-row table:style-name="表格139.1">
          <table:table-cell table:style-name="表格139.A3" office:value-type="string">
            <text:p text:style-name="P25" loext:marker-style-name="T78"><text:span text:style-name="T77">防護重點</text:span><text:span text:style-name="T78"/></text:p>
          </table:table-cell>
          <table:table-cell table:style-name="表格139.A3" office:value-type="string">
            <text:p text:style-name="P25" loext:marker-style-name="T78"><text:span text:style-name="T77">網路邊界 </text:span><text:span text:style-name="T138">/ </text:span><text:span text:style-name="T77">防火牆</text:span></text:p>
          </table:table-cell>
          <table:table-cell table:style-name="表格139.A3" office:value-type="string">
            <text:p text:style-name="P25" loext:marker-style-name="T78"><text:span text:style-name="T77">身份 </text:span><text:span text:style-name="T138">× </text:span><text:span text:style-name="T77">設備 </text:span><text:span text:style-name="T138">× </text:span><text:span text:style-name="T77">情境</text:span></text:p>
          </table:table-cell>
        </table:table-row>
        <table:table-row table:style-name="表格139.1">
          <table:table-cell table:style-name="表格139.A2" office:value-type="string">
            <text:p text:style-name="P25" loext:marker-style-name="T78"><text:span text:style-name="T77">登入之後</text:span><text:span text:style-name="T78"/></text:p>
          </table:table-cell>
          <table:table-cell table:style-name="表格139.A2" office:value-type="string">
            <text:p text:style-name="P25" loext:marker-style-name="T78"><text:span text:style-name="T77">幾乎不再驗證</text:span><text:span text:style-name="T78"/></text:p>
          </table:table-cell>
          <table:table-cell table:style-name="表格139.A2" office:value-type="string">
            <text:p text:style-name="P25" loext:marker-style-name="T78"><text:span text:style-name="T77">每個操作持續驗證</text:span><text:span text:style-name="T78"/></text:p>
          </table:table-cell>
        </table:table-row>
        <table:table-row table:style-name="表格139.1">
          <table:table-cell table:style-name="表格139.A3" office:value-type="string">
            <text:p text:style-name="P25" loext:marker-style-name="T78"><text:span text:style-name="T77">駭客入侵後</text:span><text:span text:style-name="T78"/></text:p>
          </table:table-cell>
          <table:table-cell table:style-name="表格139.A3" office:value-type="string">
            <text:p text:style-name="P25" loext:marker-style-name="T78"><text:span text:style-name="T77">可橫向移動整個內網</text:span><text:span text:style-name="T78"/></text:p>
          </table:table-cell>
          <table:table-cell table:style-name="表格139.A3" office:value-type="string">
            <text:p text:style-name="P25" loext:marker-style-name="T78"><text:span text:style-name="T77">被微分段限制，難以擴散</text:span><text:span text:style-name="T78"/>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25" loext:marker-style-name="T78"><text:span text:style-name="T77">適合時代</text:span><text:span text:style-name="T78"/></text:p>
          </table:table-cell>
          <table:table-cell table:style-name="表格139.A2" office:value-type="string">
            <text:p text:style-name="P25" loext:marker-style-name="T78"><text:span text:style-name="T77">固定辦公室 </text:span><text:span text:style-name="T138">/ </text:span><text:span text:style-name="T77">單一內網</text:span></text:p>
          </table:table-cell>
          <table:table-cell table:style-name="表格139.A2" office:value-type="string">
            <text:p text:style-name="P25" loext:marker-style-name="T78"><text:span text:style-name="T138">Cloud / </text:span><text:span text:style-name="T77">遠端 </text:span><text:span text:style-name="T138">/ </text:span><text:span text:style-name="T77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8"><text:span text:style-name="T176">🔑 <text:s/></text:span><text:span text:style-name="T226">核心一句話</text:span></text:p>
            <text:p text:style-name="P9" loext:marker-style-name="T230"><text:span text:style-name="T233">❝ </text:span><text:span text:style-name="T227">永不信任，始終驗證 ❞（</text:span><text:span text:style-name="T233">Never Trust, Always Verify</text:span><text:span text:style-name="T227">）</text:span></text:p>
            <text:p text:style-name="P10" loext:marker-style-name="T101"><text:span text:style-name="T99">無論使用者身處公司內網或外部網路，無論設備是否為公司配發，系統都不會因為「位置」就直接信任，而是透過多重機制持續確認安全性。</text:span><text:span text:style-name="T101"/></text:p>
          </table:table-cell>
          <table:covered-table-cell/>
          <table:covered-table-cell/>
        </table:table-row>
      </table:table>
      <text:h text:style-name="P3" text:outline-level="3"><text:span text:style-name="T178">▍</text:span><text:span text:style-name="T179"> </text:span><text:span text:style-name="T180">三大核心支柱：人 </text:span><text:span text:style-name="T179">· </text:span><text:span text:style-name="T180">機 </text:span><text:span text:style-name="T179">· </text:span><text:span text:style-name="T180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6" loext:marker-style-name="T71"><text:span text:style-name="T70">支柱</text:span><text:span text:style-name="T71"/></text:p>
            </table:table-cell>
            <table:table-cell table:style-name="表格140.A1" office:value-type="string">
              <text:p text:style-name="P6" loext:marker-style-name="T71"><text:span text:style-name="T70">口訣</text:span><text:span text:style-name="T71"/></text:p>
            </table:table-cell>
            <table:table-cell table:style-name="表格140.A1" office:value-type="string">
              <text:p text:style-name="P6" loext:marker-style-name="T71"><text:span text:style-name="T70">具體內容</text:span><text:span text:style-name="T71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5" loext:marker-style-name="T129"><text:span text:style-name="T170">🔑 Identity</text:span><text:span text:style-name="T130">（身份驗證）</text:span></text:p>
          </table:table-cell>
          <table:table-cell table:style-name="表格140.A2" office:value-type="string">
            <text:p text:style-name="P25" loext:marker-style-name="T129"><text:span text:style-name="T130">人</text:span><text:span text:style-name="T129"/></text:p>
          </table:table-cell>
          <table:table-cell table:style-name="表格140.A2" office:value-type="string">
            <text:p text:style-name="P25" loext:marker-style-name="T129"><text:span text:style-name="T130">確認使用者是本人：帳密、</text:span><text:span text:style-name="T170">MFA</text:span><text:span text:style-name="T130">（手機 </text:span><text:span text:style-name="T170">OTP</text:span><text:span text:style-name="T130">、指紋）、</text:span><text:span text:style-name="T170">IAM </text:span><text:span text:style-name="T130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5" loext:marker-style-name="T129"><text:span text:style-name="T170">💻 Device</text:span><text:span text:style-name="T130">（設備健康）</text:span></text:p>
          </table:table-cell>
          <table:table-cell table:style-name="表格140.A3" office:value-type="string">
            <text:p text:style-name="P25" loext:marker-style-name="T129"><text:span text:style-name="T130">機</text:span><text:span text:style-name="T129"/></text:p>
          </table:table-cell>
          <table:table-cell table:style-name="表格140.A3" office:value-type="string">
            <text:p text:style-name="P25" loext:marker-style-name="T129"><text:span text:style-name="T130">確認設備是否安全：防毒更新、系統版本、是否為授權設備（</text:span><text:span text:style-name="T170">Device Posture</text:span><text:span text:style-name="T130">）</text:span></text:p>
          </table:table-cell>
        </table:table-row>
        <table:table-row table:style-name="表格140.1">
          <table:table-cell table:style-name="表格140.A2" office:value-type="string">
            <text:p text:style-name="P25" loext:marker-style-name="T129"><text:span text:style-name="T170">🌐 Context</text:span><text:span text:style-name="T130">（存取情境）</text:span></text:p>
          </table:table-cell>
          <table:table-cell table:style-name="表格140.A2" office:value-type="string">
            <text:p text:style-name="P25" loext:marker-style-name="T129"><text:span text:style-name="T130">境</text:span><text:span text:style-name="T129"/></text:p>
          </table:table-cell>
          <table:table-cell table:style-name="表格140.A2" office:value-type="string">
            <text:p text:style-name="P25" loext:marker-style-name="T129"><text:span text:style-name="T130">評估環境是否異常：登入時間、地點、行為模式；凌晨從境外登入會觸發額外驗證</text:span><text:span text:style-name="T129"/></text:p>
          </table:table-cell>
        </table:table-row>
      </table:table>
      <text:h text:style-name="P3" text:outline-level="3"><text:span text:style-name="T178">▍</text:span><text:span text:style-name="T179"> </text:span><text:span text:style-name="T180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6" loext:marker-style-name="T71"><text:span text:style-name="T70">機制</text:span><text:span text:style-name="T71"/></text:p>
            </table:table-cell>
            <table:table-cell table:style-name="表格141.A1" office:value-type="string">
              <text:p text:style-name="P6" loext:marker-style-name="T71"><text:span text:style-name="T70">說明</text:span><text:span text:style-name="T71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5" loext:marker-style-name="T129"><text:span text:style-name="T170">① MFA </text:span><text:span text:style-name="T130">多因素驗證</text:span></text:p>
          </table:table-cell>
          <table:table-cell table:style-name="表格141.A2" office:value-type="string">
            <text:p text:style-name="P25" loext:marker-style-name="T129"><text:span text:style-name="T130">登入不只密碼，還需第二層驗證（手機驗證碼、指紋、硬體金鑰），密碼外洩也難入侵</text:span><text:span text:style-name="T129"/></text:p>
          </table:table-cell>
        </table:table-row>
        <table:table-row table:style-name="表格141.1">
          <table:table-cell table:style-name="表格141.A3" office:value-type="string">
            <text:p text:style-name="P25" loext:marker-style-name="T129"><text:span text:style-name="T170">② Least Privilege </text:span><text:span text:style-name="T130">最小權限</text:span></text:p>
          </table:table-cell>
          <table:table-cell table:style-name="表格141.A3" office:value-type="string">
            <text:p text:style-name="P25" loext:marker-style-name="T129"><text:span text:style-name="T130">每位使用者只獲得完成工作所需的最低權限。權限愈小，風險愈低</text:span><text:span text:style-name="T129"/></text:p>
          </table:table-cell>
        </table:table-row>
        <table:table-row table:style-name="表格141.1">
          <table:table-cell table:style-name="表格141.A2" office:value-type="string">
            <text:p text:style-name="P25" loext:marker-style-name="T129"><text:span text:style-name="T170">③ Micro-Segmentation </text:span><text:span text:style-name="T130">微分段</text:span></text:p>
          </table:table-cell>
          <table:table-cell table:style-name="表格141.A2" office:value-type="string">
            <text:p text:style-name="P25" loext:marker-style-name="T129"><text:span text:style-name="T130">將內網切成多個獨立小區段，各區設存取控制；攻破一段也無法橫向擴散</text:span><text:span text:style-name="T129"/></text:p>
          </table:table-cell>
        </table:table-row>
        <table:table-row table:style-name="表格141.1">
          <table:table-cell table:style-name="表格141.A3" office:value-type="string">
            <text:p text:style-name="P25" loext:marker-style-name="T129"><text:span text:style-name="T170">④ Continuous Monitoring </text:span><text:span text:style-name="T130">持續監控</text:span></text:p>
          </table:table-cell>
          <table:table-cell table:style-name="表格141.A3" office:value-type="string">
            <text:p text:style-name="P25" loext:marker-style-name="T129"><text:span text:style-name="T130">全天候分析行為，異常立即警示（如半夜大量下載、短時間多國登入、刪大量日誌）</text:span><text:span text:style-name="T129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8"><text:span text:style-name="T176">🔥 <text:s/></text:span><text:span text:style-name="T180">考前 </text:span><text:span text:style-name="T190">10 </text:span><text:span text:style-name="T180">秒超濃縮</text:span></text:p>
            <text:p text:style-name="P9" loext:marker-style-name="T101"><text:span text:style-name="T148">ZT </text:span><text:span text:style-name="T99">核心：不信任任何人（含內網）；檢查三件事——人（</text:span><text:span text:style-name="T148">Identity</text:span><text:span text:style-name="T99">）、機（</text:span><text:span text:style-name="T148">Device</text:span><text:span text:style-name="T99">）、境（</text:span><text:span text:style-name="T148">Context</text:span><text:span text:style-name="T99">）；搭配四招——</text:span><text:span text:style-name="T148">MFA </text:span><text:span text:style-name="T99">＋ 最小權限 ＋ 微分段 ＋ 持續監控。</text:span></text:p>
            <text:p text:style-name="P10" loext:marker-style-name="T101"><text:span text:style-name="T99">口訣：人機境，多驗、少給、切塊、一直看。</text:span><text:span text:style-name="T101"/></text:p>
          </table:table-cell>
          <table:covered-table-cell/>
        </table:table-row>
      </table:table>
      <text:h text:style-name="P3" text:outline-level="3"><text:span text:style-name="T178">▍</text:span><text:span text:style-name="T179"> Zero Trust </text:span><text:span text:style-name="T180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6" loext:marker-style-name="T71"><text:span text:style-name="T76">Step</text:span><text:span text:style-name="T71"/></text:p>
            </table:table-cell>
            <table:table-cell table:style-name="表格142.A1" office:value-type="string">
              <text:p text:style-name="P6" loext:marker-style-name="T71"><text:span text:style-name="T70">動作</text:span><text:span text:style-name="T71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5" loext:marker-style-name="T129"><text:span text:style-name="T170">1 </text:span><text:span text:style-name="T130">發出存取請求</text:span></text:p>
          </table:table-cell>
          <table:table-cell table:style-name="表格142.A2" office:value-type="string">
            <text:p text:style-name="P25" loext:marker-style-name="T129"><text:span text:style-name="T130">使用者或設備嘗試存取某資源（系統 </text:span><text:span text:style-name="T170">/ </text:span><text:span text:style-name="T130">檔案 </text:span><text:span text:style-name="T170">/ </text:span><text:span text:style-name="T130">資料庫）</text:span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29"><text:span text:style-name="T170">2 </text:span><text:span text:style-name="T130">身份驗證 </text:span><text:span text:style-name="T170">Identity</text:span></text:p>
          </table:table-cell>
          <table:table-cell table:style-name="表格142.A3" office:value-type="string">
            <text:p text:style-name="P25" loext:marker-style-name="T129"><text:span text:style-name="T130">確認身份：帳密 </text:span><text:span text:style-name="T170">+ MFA </text:span><text:span text:style-name="T130">驗證通過</text:span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29"><text:span text:style-name="T170">3 </text:span><text:span text:style-name="T130">設備驗證 </text:span><text:span text:style-name="T170">Device</text:span></text:p>
          </table:table-cell>
          <table:table-cell table:style-name="表格142.A2" office:value-type="string">
            <text:p text:style-name="P25" loext:marker-style-name="T129"><text:span text:style-name="T130">檢查設備健康：防毒、更新、合規性符合要求</text:span><text:span text:style-name="T129"/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29"><text:span text:style-name="T170">4 </text:span><text:span text:style-name="T130">情境評估 </text:span><text:span text:style-name="T170">Context</text:span></text:p>
          </table:table-cell>
          <table:table-cell table:style-name="表格142.A3" office:value-type="string">
            <text:p text:style-name="P25" loext:marker-style-name="T129"><text:span text:style-name="T130">分析存取時間、地點、行為模式，計算風險分數</text:span><text:span text:style-name="T129"/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29"><text:span text:style-name="T170">5 </text:span><text:span text:style-name="T130">權限比對</text:span></text:p>
          </table:table-cell>
          <table:table-cell table:style-name="表格142.A2" office:value-type="string">
            <text:p text:style-name="P25" loext:marker-style-name="T129"><text:span text:style-name="T130">依最小權限原則，確認是否有權存取該資源</text:span><text:span text:style-name="T129"/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29"><text:span text:style-name="T170">6 </text:span><text:span text:style-name="T130">授權或拒絕</text:span></text:p>
          </table:table-cell>
          <table:table-cell table:style-name="表格142.A3" office:value-type="string">
            <text:p text:style-name="P25" loext:marker-style-name="T129"><text:span text:style-name="T130">風險低且權限符合 → 授權；否則 → 要求補充驗證或拒絕</text:span><text:span text:style-name="T129"/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29"><text:span text:style-name="T170">7 </text:span><text:span text:style-name="T130">持續監控</text:span></text:p>
          </table:table-cell>
          <table:table-cell table:style-name="表格142.A2" office:value-type="string">
            <text:p text:style-name="P25" loext:marker-style-name="T129"><text:span text:style-name="T130">授權後全程監控行為，發現異常立即告警或中斷連線</text:span><text:span text:style-name="T129"/>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8"><text:span text:style-name="T176">⚠️ <text:s/></text:span><text:span text:style-name="T198">公職考試陷阱整理</text:span></text:p>
            <text:p text:style-name="P9"><text:span text:style-name="T157">ZT = </text:span><text:span text:style-name="T114">完全不相信員工？　</text:span><text:span text:style-name="T99">✗ 重點是「每次都驗證」，驗證通過員工仍可正常使用，只是不再預設信任。</text:span></text:p>
            <text:p text:style-name="P10"><text:span text:style-name="T114">只有外網才危險？　</text:span><text:span text:style-name="T99">✗ 內網也可能：帳號被盜、設備中毒、內部人員惡意操作，故內網也須驗證。</text:span></text:p>
            <text:p text:style-name="P10"><text:span text:style-name="T114">登入一次後就永久可信？　</text:span><text:span text:style-name="T99">✗ 持續驗證，單次登入不代表長期信任，高風險行為會觸發重新驗證。</text:span></text:p>
            <text:p text:style-name="P10"><text:span text:style-name="T157">Zero Trust </text:span><text:span text:style-name="T114">重視網路位置？（超常考）　</text:span><text:span text:style-name="T99">✗ 完全相反！重點從「位置」轉移到「身份 </text:span><text:span text:style-name="T148">/ </text:span><text:span text:style-name="T99">設備 </text:span><text:span text:style-name="T148">/ </text:span><text:span text:style-name="T99">情境」。</text:span></text:p>
          </table:table-cell>
          <table:covered-table-cell/>
        </table:table-row>
      </table:table>
      <text:h text:style-name="P13" text:outline-level="1" loext:marker-style-name="T67"><text:span text:style-name="T66">結語　</text:span><text:span text:style-name="T67">·</text:span><text:span text:style-name="T66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8"><text:span text:style-name="T176">✅ <text:s/></text:span><text:span text:style-name="T180">你已經完成一輪</text:span></text:p>
            <text:p text:style-name="P9" loext:marker-style-name="T101"><text:span text:style-name="T99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101"/></text:p>
          </table:table-cell>
        </table:table-row>
        <table:table-row table:style-name="表格143.1">
          <table:table-cell table:style-name="表格143.A2" office:value-type="string">
            <text:p text:style-name="P8"><text:span text:style-name="T176">🎯 <text:s/></text:span><text:span text:style-name="T226">五個高頻拿分重點</text:span></text:p>
            <text:p text:style-name="P9" loext:marker-style-name="T101"><text:span text:style-name="T148">① </text:span><text:span text:style-name="T99">分層先記責任：應用給人用、傳輸怎麼送、網路走哪條、連結同區網。</text:span></text:p>
            <text:p text:style-name="P10" loext:marker-style-name="T101"><text:span text:style-name="T148">② </text:span><text:span text:style-name="T99">計算題動手練：</text:span><text:span text:style-name="T148">VLSM</text:span><text:span text:style-name="T99">「需求</text:span><text:span text:style-name="T148">+2→</text:span><text:span text:style-name="T99">最小 </text:span><text:span text:style-name="T148">2ⁿ→/(32−n)</text:span><text:span text:style-name="T99">」、可用主機「</text:span><text:span text:style-name="T148">2^</text:span><text:span text:style-name="T99">主機</text:span><text:span text:style-name="T148">bit −2</text:span><text:span text:style-name="T99">」。</text:span></text:p>
            <text:p text:style-name="P10" loext:marker-style-name="T101"><text:span text:style-name="T148">③ </text:span><text:span text:style-name="T99">流程要會串：上網＝</text:span><text:span text:style-name="T148">DNS→ARP→NAT</text:span><text:span text:style-name="T99">；</text:span><text:span text:style-name="T148">TCP</text:span><text:span text:style-name="T99">＝握手→</text:span><text:span text:style-name="T148">Slow Start→CA→</text:span><text:span text:style-name="T99">丟包降速。</text:span></text:p>
            <text:p text:style-name="P10" loext:marker-style-name="T101"><text:span text:style-name="T148">④ </text:span><text:span text:style-name="T99">易混成對背：</text:span><text:span text:style-name="T148">FW/WAF/NGFW</text:span><text:span text:style-name="T99">、</text:span><text:span text:style-name="T148">IDS/IPS</text:span><text:span text:style-name="T99">、</text:span><text:span text:style-name="T148">HIDS/NIDS</text:span><text:span text:style-name="T99">、</text:span><text:span text:style-name="T148">SNMP/ICMP</text:span><text:span text:style-name="T99">、</text:span><text:span text:style-name="T148">EDR/MDR</text:span><text:span text:style-name="T99">、</text:span><text:span text:style-name="T148">RTO/RPO</text:span><text:span text:style-name="T99">、</text:span><text:span text:style-name="T148">Recursive/Iterative</text:span><text:span text:style-name="T99">。</text:span></text:p>
            <text:p text:style-name="P10" loext:marker-style-name="T101"><text:span text:style-name="T148">⑤ </text:span><text:span text:style-name="T99">陷阱反著記：</text:span><text:span text:style-name="T148">ARP </text:span><text:span text:style-name="T99">找路由器不是 </text:span><text:span text:style-name="T148">Google</text:span><text:span text:style-name="T99">、</text:span><text:span text:style-name="T148">BGP </text:span><text:span text:style-name="T99">政策不是距離、</text:span><text:span text:style-name="T148">WiFi </text:span><text:span text:style-name="T99">是 </text:span><text:span text:style-name="T148">CA </text:span><text:span text:style-name="T99">不是 </text:span><text:span text:style-name="T148">CD</text:span><text:span text:style-name="T99">、</text:span><text:span text:style-name="T148">IOC </text:span><text:span text:style-name="T99">是事後不是預測、</text:span><text:span text:style-name="T148">Zero Trust </text:span><text:span text:style-name="T99">看身份不看位置。</text:span></text:p>
          </table:table-cell>
        </table:table-row>
      </table:table>
      <text:p text:style-name="P21" loext:marker-style-name="T56"><text:span text:style-name="T55">祝　金榜題名　</text:span><text:span text:style-name="T63">·</text:span><text:span text:style-name="T55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6T17:08:35.752000000</dc:date>
    <meta:editing-cycles>345</meta:editing-cycles>
    <dc:title>網路概論與資訊安全 完整整合筆記</dc:title>
    <meta:editing-duration>P2DT7H30M20S</meta:editing-duration>
    <meta:generator>MODA_ODF_Application_Tools/3.8.4.2$Windows_X86_64 LibreOffice_project/4fb77107d5af14329e08085efe4fa19b5633383a</meta:generator>
    <meta:document-statistic meta:table-count="143" meta:image-count="0" meta:object-count="0" meta:page-count="52" meta:paragraph-count="2301" meta:word-count="30250" meta:character-count="47840" meta:non-whitespace-character-count="43133"/>
    <meta:user-defined meta:name="AppVersion">15.0000</meta:user-defined>
  </office:meta>
</office:document-meta>
</file>