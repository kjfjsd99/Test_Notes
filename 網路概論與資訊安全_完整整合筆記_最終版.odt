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D" style:family="table-column">
      <style:table-column-properties style:column-width="4.232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5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3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D" style:family="table-column">
      <style:table-column-properties style:column-width="4.232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4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7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6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D" style:family="table-column">
      <style:table-column-properties style:column-width="4.232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6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1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2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5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7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7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698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B" style:family="table-column">
      <style:table-column-properties style:column-width="8.465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7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2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1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468cm"/>
    </style:style>
    <style:style style:name="表格66.B" style:family="table-column">
      <style:table-column-properties style:column-width="5.47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48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8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6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B" style:family="table-column">
      <style:table-column-properties style:column-width="8.465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5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B" style:family="table-column">
      <style:table-column-properties style:column-width="8.465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B" style:family="table-column">
      <style:table-column-properties style:column-width="8.465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B" style:family="table-column">
      <style:table-column-properties style:column-width="8.465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08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B" style:family="table-column">
      <style:table-column-properties style:column-width="8.465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3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69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6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4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3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2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4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B" style:family="table-column">
      <style:table-column-properties style:column-width="8.465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5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6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7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6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B" style:family="table-column">
      <style:table-column-properties style:column-width="8.465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B" style:family="table-column">
      <style:table-column-properties style:column-width="8.465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69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698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</style:style>
    <style:style style:name="P2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3" style:family="paragraph" style:parent-style-name="Heading_20_3">
      <style:paragraph-properties fo:margin-top="0.318cm" fo:margin-bottom="0.123cm" style:contextual-spacing="false"/>
    </style:style>
    <style:style style:name="P4" style:family="paragraph" style:parent-style-name="Standard">
      <style:paragraph-properties fo:margin-top="2.822cm" fo:margin-bottom="0cm" style:contextual-spacing="false"/>
    </style:style>
    <style:style style:name="P5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6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</style:style>
    <style:style style:name="P7" style:family="paragraph" style:parent-style-name="Standard">
      <style:paragraph-properties fo:margin-top="0.106cm" fo:margin-bottom="0.071cm" style:contextual-spacing="false" fo:text-align="center" style:justify-single-word="false"/>
    </style:style>
    <style:style style:name="P8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9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</style:style>
    <style:style style:name="P10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P11" style:family="paragraph" style:parent-style-name="Standard">
      <style:paragraph-properties fo:margin-top="0cm" fo:margin-bottom="0.388cm" style:contextual-spacing="false"/>
    </style:style>
    <style:style style:name="P12" style:family="paragraph" style:parent-style-name="Standard">
      <style:paragraph-properties fo:margin-top="0.018cm" fo:margin-bottom="0.018cm" style:contextual-spacing="false" fo:line-height="0.437cm" fo:text-align="center" style:justify-single-word="false"/>
    </style:style>
    <style:style style:name="P13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14" style:family="paragraph" style:parent-style-name="Standard">
      <style:paragraph-properties fo:margin-top="0.046cm" fo:margin-bottom="0.046cm" style:contextual-spacing="false" fo:line-height="0.441cm" fo:text-align="center" style:justify-single-word="false"/>
    </style:style>
    <style:style style:name="P15" style:family="paragraph" style:parent-style-name="Standard">
      <style:paragraph-properties fo:margin-top="0.046cm" fo:margin-bottom="0.046cm" style:contextual-spacing="false" fo:line-height="0.441cm" fo:text-align="start" style:justify-single-word="false"/>
    </style:style>
    <style:style style:name="P16" style:family="paragraph" style:parent-style-name="Standard">
      <style:paragraph-properties fo:margin-top="0cm" fo:margin-bottom="0.353cm" style:contextual-spacing="false"/>
    </style:style>
    <style:style style:name="P17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18" style:family="paragraph" style:parent-style-name="Standard">
      <style:paragraph-properties fo:margin-top="0.035cm" fo:margin-bottom="0.106cm" style:contextual-spacing="false" fo:line-height="0.459cm"/>
    </style:style>
    <style:style style:name="P19" style:family="paragraph" style:parent-style-name="Standard">
      <style:paragraph-properties fo:margin-top="0cm" fo:margin-bottom="0.042cm" style:contextual-spacing="false" fo:line-height="0.455cm"/>
    </style:style>
    <style:style style:name="P20" style:family="paragraph" style:parent-style-name="Standard">
      <style:paragraph-properties fo:margin-top="0.042cm" fo:margin-bottom="0.042cm" style:contextual-spacing="false" fo:line-height="0.455cm"/>
    </style:style>
    <style:style style:name="P21" style:family="paragraph" style:parent-style-name="Standard">
      <style:paragraph-properties fo:margin-top="0cm" fo:margin-bottom="0.212cm" style:contextual-spacing="false" fo:break-before="page"/>
    </style:style>
    <style:style style:name="P22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margin-top="0.071cm" fo:margin-bottom="0.106cm" style:contextual-spacing="false" fo:line-height="0.466cm" fo:text-align="start" style:justify-single-word="false"/>
    </style:style>
    <style:style style:name="P25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T1" style:family="text"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2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5" style:family="text"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" style:family="text"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7" style:family="text"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T8" style:family="text"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9" style:family="text"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T10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1" style:family="text"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2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14" style:family="text"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15" style:family="text"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6" style:family="text"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17" style:family="text"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8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19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20" style:family="text"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T22" style:family="text"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3" style:family="text"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24" style:family="text"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5" style:family="text"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6" style:family="text"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27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8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9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31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32" style:family="text"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33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34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35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6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8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0" style:family="text"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" style:family="text">
      <style:text-properties fo:color="#b83227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42" style:family="text"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3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" style:family="text"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5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6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2f7a4d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48" style:family="text"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9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50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<text:span text:style-name="T1">公職考試 · 資訊類</text:span></text:p>
      <text:p text:style-name="P6"><text:span text:style-name="T7">網路概論 與 資訊安全</text:span></text:p>
      <text:p text:style-name="P7"><text:span text:style-name="T8">完整整合筆記 · 最終版</text:span></text:p>
      <text:p text:style-name="P8"><text:span text:style-name="T15">OSI / TCP/IP ‧ IP 子網 ‧ IPv6 ‧ ARP/NAT ‧ TCP ‧ DNS ‧ 路由 ‧ SDN/CDN/5G ‧ 無線 ‧ 資安全攻防</text:span></text:p>
      <text:p text:style-name="P11"/>
      <table:table table:name="表格1" table:style-name="表格1">
        <table:table-column table:style-name="表格1.A" table:number-columns-repeated="3"/>
        <table:table-column table:style-name="表格1.D"/>
        <table:table-header-rows>
          <table:table-row table:style-name="表格1.1">
            <table:table-cell table:style-name="表格1.A1" office:value-type="string">
              <text:p text:style-name="P12"><text:span text:style-name="T22">涵蓋十大主題</text:span></text:p>
            </table:table-cell>
            <table:table-cell table:style-name="表格1.A1" office:value-type="string">
              <text:p text:style-name="P12"><text:span text:style-name="T22">前置速記</text:span></text:p>
            </table:table-cell>
            <table:table-cell table:style-name="表格1.A1" office:value-type="string">
              <text:p text:style-name="P12"><text:span text:style-name="T22">全程對照</text:span></text:p>
            </table:table-cell>
            <table:table-cell table:style-name="表格1.A1" office:value-type="string">
              <text:p text:style-name="P12"><text:span text:style-name="T22">考試導向</text:span>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14"><text:span text:style-name="T27">十篇章節</text:span></text:p>
          </table:table-cell>
          <table:table-cell table:style-name="表格1.A2" office:value-type="string">
            <text:p text:style-name="P14"><text:span text:style-name="T27">口訣 + 表格</text:span></text:p>
          </table:table-cell>
          <table:table-cell table:style-name="表格1.A2" office:value-type="string">
            <text:p text:style-name="P14"><text:span text:style-name="T27">陷阱 + 正解</text:span></text:p>
          </table:table-cell>
          <table:table-cell table:style-name="表格1.A2" office:value-type="string">
            <text:p text:style-name="P14"><text:span text:style-name="T27">申論 + 選擇</text:span></text:p>
          </table:table-cell>
        </table:table-row>
      </table:table>
      <text:p text:style-name="P16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8"><text:span text:style-name="T33">📖 <text:s/></text:span><text:span text:style-name="T2">讀這份筆記的方法</text:span></text:p>
            <text:p text:style-name="P19"><text:span text:style-name="T3">使用方式：</text:span><text:span text:style-name="T28">第〇篇「考前速記總表」收錄全書所有口訣與必背表格，考前衝刺只看這篇即可；</text:span></text:p>
            <text:p text:style-name="P20"><text:span text:style-name="T28">第一～十篇為完整詳解，建立觀念與申論寫法時閱讀。每篇皆附「常見陷阱」與「考試標準答案」。</text:span></text:p>
          </table:table-cell>
        </table:table-row>
      </table:table>
      <text:p text:style-name="P21"><text:span text:style-name="T9">目　錄</text:span></text:p>
      <text:p text:style-name="P17"><text:span text:style-name="T16">Table of Contents</text:span></text:p>
      <text:p text:style-name="P22"><text:span text:style-name="T2">第 〇 篇　考前速記總表 — 口訣 × 必背表格</text:span><text:span text:style-name="T18"><text:tab/>3</text:span></text:p>
      <text:p text:style-name="P22"><text:span text:style-name="T19">　　Part A　口訣大全（依主題分類）</text:span><text:span text:style-name="T18"><text:tab/>3</text:span></text:p>
      <text:p text:style-name="P22"><text:span text:style-name="T19">　　Part B　必背表格精選</text:span><text:span text:style-name="T18"><text:tab/>5</text:span></text:p>
      <text:p text:style-name="P23"><text:span text:style-name="T10">第 一 篇　網路基礎架構：OSI / TCP-IP · 協定 · ARP · Traceroute</text:span><text:span text:style-name="T18"><text:tab/>9</text:span></text:p>
      <text:p text:style-name="P22"><text:span text:style-name="T10">第 二 篇　IP 位址與封包處理：分類 · CIDR · VLSM · Fragmentation</text:span><text:span text:style-name="T18"><text:tab/>13</text:span></text:p>
      <text:p text:style-name="P22"><text:span text:style-name="T10">第 三 篇　IPv4 → IPv6 過渡技術</text:span><text:span text:style-name="T18"><text:tab/>19</text:span></text:p>
      <text:p text:style-name="P22"><text:span text:style-name="T10">第 四 篇　ARP、NAT 與完整上網流程</text:span><text:span text:style-name="T18"><text:tab/>21</text:span></text:p>
      <text:p text:style-name="P22"><text:span text:style-name="T10">第 五 篇　TCP 傳輸控制深入</text:span><text:span text:style-name="T18"><text:tab/>24</text:span></text:p>
      <text:p text:style-name="P22"><text:span text:style-name="T10">第 六 篇　DNS 與 DNSSEC</text:span><text:span text:style-name="T18"><text:tab/>28</text:span></text:p>
      <text:p text:style-name="P22"><text:span text:style-name="T10">第 七 篇　路由協定：OSPF 與 BGP</text:span><text:span text:style-name="T18"><text:tab/>31</text:span></text:p>
      <text:p text:style-name="P22"><text:span text:style-name="T10">第 八 篇　網路系統進階：SDN · LB · CDN · 5G</text:span><text:span text:style-name="T18"><text:tab/>34</text:span></text:p>
      <text:p text:style-name="P22"><text:span text:style-name="T10">第 九 篇　無線通訊：WiFi vs Bluetooth</text:span><text:span text:style-name="T18"><text:tab/>37</text:span></text:p>
      <text:p text:style-name="P22"><text:span text:style-name="T10">第 十 篇　資訊安全：設備 · 攻防 · 企業資安 · Zero Trust</text:span><text:span text:style-name="T18"><text:tab/>40</text:span></text:p>
      <text:p text:style-name="P23"><text:span text:style-name="T2">結　語　考前最後叮嚀</text:span><text:span text:style-name="T18"><text:tab/>51</text:span></text:p>
      <text:h text:style-name="P1" text:outline-level="1"><text:span text:style-name="T23">第 〇 篇　考前速記總表 — 口訣 × 必背表格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8"><text:span text:style-name="T33">⚡ <text:s/></text:span><text:span text:style-name="T10">本篇用途</text:span></text:p>
            <text:p text:style-name="P19"><text:span text:style-name="T28">這一篇把全書最關鍵的「記憶口訣」與「必背表格」依主題集中，方便考前快速複習；每一條後方括號為對應的詳解篇章。</text:span></text:p>
          </table:table-cell>
        </table:table-row>
      </table:table>
      <text:h text:style-name="P2" text:outline-level="2"><text:span text:style-name="T4">Part A　口訣大全（依主題分類）</text:span></text:h>
      <text:h text:style-name="P3" text:outline-level="3"><text:span text:style-name="T34">▍</text:span><text:span text:style-name="T35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8"><text:span text:style-name="T35">🔑 口訣</text:span></text:p>
            <text:p text:style-name="P19"><text:span text:style-name="T36">TCP/IP 四層心法：</text:span><text:span text:style-name="T28">應用層→給人用（HTTP/DNS/DHCP/SSH/MQTT）｜傳輸層→怎麼送（TCP 穩、UDP 快）｜網路層→走哪條路（IP/ICMP）｜連結層→同一區網怎麼接（Ethernet/ARP）</text:span></text:p>
            <text:p text:style-name="P20"><text:span text:style-name="T36">OSI vs TCP/IP：</text:span><text:span text:style-name="T28">OSI 7 層（理論）、TCP/IP 4 層（實際）；差別在 TCP/IP 把 Session＋Presentation 併入 Application。</text:span></text:p>
            <text:p text:style-name="P20"><text:span text:style-name="T36">TCP vs UDP：</text:span><text:span text:style-name="T28">TCP「穩定優先」（保證送達、會重傳）；UDP「速度優先」（不保證、不重傳）。</text:span></text:p>
            <text:p text:style-name="P20"><text:span text:style-name="T36">三件事：</text:span><text:span text:style-name="T28">IP→定位（目的地是誰）｜Routing→選路（怎麼走最快）｜ICMP→回報（出錯通知你）。</text:span></text:p>
            <text:p text:style-name="P20"><text:span text:style-name="T36">Traceroute＝</text:span><text:span text:style-name="T28">TTL 遞增 ＋ ICMP 回報，逐步「炸出」完整路徑。</text:span></text:p>
            <text:p text:style-name="P20"><text:span text:style-name="T36">ARP＝</text:span><text:span text:style-name="T28">用 IP 找 MAC，只在同一個 LAN 內使用。</text:span></text:p>
          </table:table-cell>
        </table:table-row>
      </table:table>
      <text:h text:style-name="P3" text:outline-level="3"><text:span text:style-name="T34">▍</text:span><text:span text:style-name="T35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8"><text:span text:style-name="T35">🔑 口訣</text:span></text:p>
            <text:p text:style-name="P19"><text:span text:style-name="T36">VLSM 黃金公式：</text:span><text:span text:style-name="T28">需求 ＋2 → 找最小 2ⁿ → 前綴 /(32−n)。</text:span></text:p>
            <text:p text:style-name="P20"><text:span text:style-name="T36">可用主機數：</text:span><text:span text:style-name="T28">2^(主機 bit) − 2（扣掉網路位址與廣播位址）。</text:span></text:p>
            <text:p text:style-name="P20"><text:span text:style-name="T36">CIDR 合併：</text:span><text:span text:style-name="T28">連續 ＋ 數量 2ⁿ ＋ 起點對齊 → 合併 2ⁿ 個子網則「前綴減 n」。</text:span></text:p>
            <text:p text:style-name="P20"><text:span text:style-name="T36">前綴速背：</text:span><text:span text:style-name="T28">/25=126、/26=62、/27=30、/28=14、/29=6、/30=2。</text:span></text:p>
            <text:p text:style-name="P20"><text:span text:style-name="T36">封包切割：</text:span><text:span text:style-name="T28">封包 &gt; MTU 就切（Fragmentation）；Fragment Offset ＝ 起始位置 ÷ 8。</text:span></text:p>
            <text:p text:style-name="P20"><text:span text:style-name="T36">誰能切：</text:span><text:span text:style-name="T28">IPv4＝Router 或 Source 可切；IPv6＝只有 Source 切，必搭 PMTUD。</text:span></text:p>
            <text:p text:style-name="P20"><text:span text:style-name="T36">Protocol 值：</text:span><text:span text:style-name="T28">ICMP=1、TCP=6、UDP=17｜DF=1 禁止切、MF=1 後面還有分段｜MSS＝MTU−20−20＝1460。</text:span></text:p>
          </table:table-cell>
        </table:table-row>
      </table:table>
      <text:h text:style-name="P3" text:outline-level="3"><text:span text:style-name="T34">▍</text:span><text:span text:style-name="T35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8"><text:span text:style-name="T35">🔑 口訣</text:span></text:p>
            <text:p text:style-name="P19"><text:span text:style-name="T36">IPv6 特點：</text:span><text:span text:style-name="T28">大（128 bit）＋ 安全（IPsec）＋ 快（固定 Header）＋ 自動（SLAAC）＋ 乾淨（無 Broadcast）。</text:span></text:p>
            <text:p text:style-name="P20"><text:span text:style-name="T36">三種過渡技術：</text:span><text:span text:style-name="T28">雙語（Dual Stack）＋ 偽裝（Tunneling）＋ 翻譯（Translation）。</text:span></text:p>
            <text:p text:style-name="P20"><text:span text:style-name="T36">生活比喻：</text:span><text:span text:style-name="T28">Dual Stack＝同時會中英文；Tunneling＝英文信裝進中文信封偷渡；Translation＝現場請翻譯口譯。</text:span></text:p>
          </table:table-cell>
        </table:table-row>
      </table:table>
      <text:h text:style-name="P3" text:outline-level="3"><text:span text:style-name="T34">▍</text:span><text:span text:style-name="T35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8"><text:span text:style-name="T35">🔑 口訣</text:span></text:p>
            <text:p text:style-name="P19"><text:span text:style-name="T36">上網流程：</text:span><text:span text:style-name="T28">DNS → ARP → L2 封包 → NAT（去程）→ Internet → NAT（回程）→ 你。</text:span></text:p>
            <text:p text:style-name="P20"><text:span text:style-name="T36">核心觀念：</text:span><text:span text:style-name="T28">IP＝最終目的地（全程不變）；MAC＝下一站（每跳更換）。</text:span></text:p>
            <text:p text:style-name="P20"><text:span text:style-name="T36">最大地雷：</text:span><text:span text:style-name="T28">ARP 找的是「路由器（預設閘道）」的 MAC，不是 Google 的 MAC。</text:span></text:p>
            <text:p text:style-name="P20"><text:soft-page-break/><text:span text:style-name="T36">PAT：</text:span><text:span text:style-name="T28">多台共用一個公網 IP，靠 Port 號碼區分（最重要）。</text:span></text:p>
          </table:table-cell>
        </table:table-row>
      </table:table>
      <text:h text:style-name="P3" text:outline-level="3"><text:span text:style-name="T34">▍</text:span><text:span text:style-name="T35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8"><text:span text:style-name="T35">🔑 口訣</text:span></text:p>
            <text:p text:style-name="P19"><text:span text:style-name="T36">三次握手：</text:span><text:span text:style-name="T28">SYN → SYN＋ACK → ACK，確認雙向都能通訊。</text:span></text:p>
            <text:p text:style-name="P20"><text:span text:style-name="T36">傳送量公式：</text:span><text:span text:style-name="T28">實際傳送量 ＝ min(rwnd, cwnd)。rwnd＝接收端限制、cwnd＝網路限制。</text:span></text:p>
            <text:p text:style-name="P20"><text:span text:style-name="T36">擁塞控制節奏：</text:span><text:span text:style-name="T28">Slow Start（指數成長）→ Congestion Avoidance（線性成長）→ 丟包（減速）。</text:span></text:p>
            <text:p text:style-name="P20"><text:span text:style-name="T36">丟包處理：</text:span><text:span text:style-name="T28">Timeout → cwnd 重設為 1 回 Slow Start；3 個重複 ACK → cwnd 減半續 CA。</text:span></text:p>
            <text:p text:style-name="P20"><text:span text:style-name="T36">AIMD：</text:span><text:span text:style-name="T28">沒丟包 每 RTT＋1（加法增長）；丟包 ×0.5（乘法減少）。</text:span></text:p>
            <text:p text:style-name="P20"><text:span text:style-name="T36">SYN Flood：</text:span><text:span text:style-name="T28">大量半連線（Half-open）耗盡 Server 資源 → DoS。</text:span></text:p>
          </table:table-cell>
        </table:table-row>
      </table:table>
      <text:h text:style-name="P3" text:outline-level="3"><text:span text:style-name="T34">▍</text:span><text:span text:style-name="T35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8"><text:span text:style-name="T35">🔑 口訣</text:span></text:p>
            <text:p text:style-name="P19"><text:span text:style-name="T36">查詢流程：</text:span><text:span text:style-name="T28">Cache → Local → Root → TLD → Authoritative → 取得 IP。</text:span></text:p>
            <text:p text:style-name="P20"><text:span text:style-name="T36">Recursive：</text:span><text:span text:style-name="T28">「代查到底」（DNS 幫你問完，你只問一次）。</text:span></text:p>
            <text:p text:style-name="P20"><text:span text:style-name="T36">Iterative：</text:span><text:span text:style-name="T28">「逐層詢問」（你自己一層一層問）。</text:span></text:p>
            <text:p text:style-name="P20"><text:span text:style-name="T36">DNSSEC：</text:span><text:span text:style-name="T28">驗證真偽，不是加密、不防 DDoS。</text:span></text:p>
          </table:table-cell>
        </table:table-row>
      </table:table>
      <text:h text:style-name="P3" text:outline-level="3"><text:span text:style-name="T34">▍</text:span><text:span text:style-name="T35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8"><text:span text:style-name="T35">🔑 口訣</text:span></text:p>
            <text:p text:style-name="P19"><text:span text:style-name="T36">範圍分類：</text:span><text:span text:style-name="T28">公司／校園內 → IGP（OSPF、RIP）；公司與公司間 → EGP（BGP）。</text:span></text:p>
            <text:p text:style-name="P20"><text:span text:style-name="T36">OSPF 規定：</text:span><text:span text:style-name="T28">所有 Area 一定要連到 Area 0（骨幹）才能互通。</text:span></text:p>
            <text:p text:style-name="P20"><text:span text:style-name="T36">OSPF 四種 Router：</text:span><text:span text:style-name="T28">Internal（不出 Area）／Backbone（在 Area 0）／ABR（跨 Area 橋樑）／ASBR（跨 AS 入口）。</text:span></text:p>
            <text:p text:style-name="P20"><text:span text:style-name="T36">BGP 選路順序：</text:span><text:span text:style-name="T28">Weight &gt; Local Pref &gt; 自己產生 &gt; AS-PATH &gt; Origin &gt; MED &gt; eBGP &gt; IGP cost &gt; Router ID。</text:span></text:p>
            <text:p text:style-name="P20"><text:span text:style-name="T36">BGP 本質：</text:span><text:span text:style-name="T28">政策導向（不是距離導向）；Local Preference 才是最重要的「通用」屬性（Weight 為 Cisco 私有）。</text:span></text:p>
            <text:p text:style-name="P20"><text:span text:style-name="T36">三層分工：</text:span><text:span text:style-name="T28">防火牆→「能不能走」｜NAT→「你是誰」｜BGP→「怎麼走」。</text:span></text:p>
          </table:table-cell>
        </table:table-row>
      </table:table>
      <text:h text:style-name="P3" text:outline-level="3"><text:span text:style-name="T34">▍</text:span><text:span text:style-name="T35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8"><text:span text:style-name="T35">🔑 口訣</text:span></text:p>
            <text:p text:style-name="P19"><text:span text:style-name="T36">SDN：</text:span><text:span text:style-name="T28">「分平面、三層 App-控-基」＝控制／資料分離；Application → Control → Infrastructure。</text:span></text:p>
            <text:p text:style-name="P20"><text:span text:style-name="T36">Load Balancing：</text:span><text:span text:style-name="T28">「LB 輪、重、黏」＝Round Robin（輪流）／Weighted RR（加權）／Stickiness（同人同台）。</text:span></text:p>
            <text:p text:style-name="P20"><text:span text:style-name="T36">CDN：</text:span><text:span text:style-name="T28">「網址轉轉轉（CNAME），資料找最近（Edge）」；CNAME＝網址→網址（非 IP）。</text:span></text:p>
            <text:p text:style-name="P20"><text:span text:style-name="T36">5G：</text:span><text:span text:style-name="T28">「快、低、多、切」＝eMBB（高速）／URLLC（超低延遲）／mMTC（大量連線）／Network Slicing（切片）。</text:span></text:p>
            <text:p text:style-name="P20"><text:span text:style-name="T36">10 秒總背：</text:span><text:span text:style-name="T28">SDN 分離三層、LB 輪重黏、CDN CNAME→最近、5G 快低多切、WiFi 聽、BT 跳。</text:span></text:p>
          </table:table-cell>
        </table:table-row>
      </table:table>
      <text:h text:style-name="P3" text:outline-level="3"><text:span text:style-name="T34">▍</text:span><text:span text:style-name="T35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8"><text:span text:style-name="T35">🔑 口訣</text:span></text:p>
            <text:p text:style-name="P19"><text:span text:style-name="T36">一句總綱：</text:span><text:span text:style-name="T28">「WiFi 先聽再說（CSMA/CA），Bluetooth 一直換頻道（FHSS）」。</text:span></text:p>
            <text:p text:style-name="P20"><text:span text:style-name="T36">本質對比：</text:span><text:span text:style-name="T28">WiFi＝搶頻道（菜市場）；BT＝排班（會議室預約）；時槽＝時間格子；SCO＝語音；L2CAP＝三通道。</text:span></text:p>
            <text:p text:style-name="P20"><text:soft-page-break/><text:span text:style-name="T36">最大陷阱：</text:span><text:span text:style-name="T28">有線 Ethernet＝CD（Detect 偵測）；無線 WiFi＝CA（Avoid 避免）。</text:span></text:p>
            <text:p text:style-name="P20"><text:span text:style-name="T36">QoS／語音：</text:span><text:span text:style-name="T28">WiFi QoS＝EDCA（急診室分級）；藍牙即時語音＝SCO／eSCO；L2CAP 位於 Data Link 層。</text:span></text:p>
          </table:table-cell>
        </table:table-row>
      </table:table>
      <text:h text:style-name="P3" text:outline-level="3"><text:span text:style-name="T34">▍</text:span><text:span text:style-name="T35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8"><text:span text:style-name="T35">🔑 口訣</text:span></text:p>
            <text:p text:style-name="P19"><text:span text:style-name="T36">設備萬用口訣：</text:span><text:span text:style-name="T28">FW 封外、WAF 看內、NGFW 最強、DMZ 隔離、IOC 壞人、Proxy 幫客、Reverse 幫服。</text:span></text:p>
            <text:p text:style-name="P20"><text:span text:style-name="T36">IOC 四線索：</text:span><text:span text:style-name="T28">網（Domain）→ 檔（Hash）→ 連（IP）→ 控（C2）。</text:span></text:p>
            <text:p text:style-name="P20"><text:span text:style-name="T36">封包闖關順序：</text:span><text:span text:style-name="T28">Client → Proxy → Internet → FW/NGFW → DMZ → WAF → Reverse Proxy → 內部 Server。</text:span></text:p>
            <text:p text:style-name="P20"><text:span text:style-name="T36">三防分工：</text:span><text:span text:style-name="T28">Firewall 擋入口、IDS 只看、IPS 看＋擋；HIDS 看主機（Log）、NIDS 看網路（封包）。</text:span></text:p>
            <text:p text:style-name="P20"><text:span text:style-name="T36">易混兩協定：</text:span><text:span text:style-name="T28">SNMP 管理設備（應用層／UDP）、ICMP 診斷網路（網路層）。</text:span></text:p>
            <text:p text:style-name="P20"><text:span text:style-name="T36">SQL Injection：</text:span><text:span text:style-name="T28">攻擊＝' OR 1=1 --；防禦核心＝Prepared Statement（預備語句）。</text:span></text:p>
            <text:p text:style-name="P20"><text:span text:style-name="T36">Zero-Day：</text:span><text:span text:style-name="T28">最怕「沒有 Signature」；防禦＝Patch 更新 ＋ IDS/IPS ＋ 網路分段。</text:span></text:p>
            <text:p text:style-name="P20"><text:span text:style-name="T36">企業資安三階段：</text:span><text:span text:style-name="T28">事前預防 → 事中偵測 → 事後復原。RTO＝停機時間、RPO＝資料損失量。</text:span></text:p>
            <text:p text:style-name="P20"><text:span text:style-name="T36">EDR/MDR：</text:span><text:span text:style-name="T28">EDR＝自己買工具守、MDR＝請公司幫你守、ATT&amp;CK＝駭客招式教材、數位韌性＝撐住快速復原。</text:span></text:p>
            <text:p text:style-name="P20"><text:span text:style-name="T36">SSDLC：</text:span><text:span text:style-name="T28">Define→Design→Develop→Test→Deploy→Maintain，精神是「左移（Shift Left）」。</text:span></text:p>
            <text:p text:style-name="P20"><text:span text:style-name="T36">Zero Trust：</text:span><text:span text:style-name="T28">永不信任，始終驗證；查「人（Identity）機（Device）境（Context）」；配 MFA＋最小權限＋微分段＋持續監控。</text:span></text:p>
          </table:table-cell>
        </table:table-row>
      </table:table>
      <text:h text:style-name="P2" text:outline-level="2"><text:span text:style-name="T4">Part B　必背表格精選（考前掃一遍）</text:span></text:h>
      <text:h text:style-name="P3" text:outline-level="3"><text:span text:style-name="T34">▍</text:span><text:span text:style-name="T35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12"><text:span text:style-name="T22">前綴</text:span></text:p>
            </table:table-cell>
            <table:table-cell table:style-name="表格14.A1" office:value-type="string">
              <text:p text:style-name="P12"><text:span text:style-name="T22">主機 bit</text:span></text:p>
            </table:table-cell>
            <table:table-cell table:style-name="表格14.A1" office:value-type="string">
              <text:p text:style-name="P12"><text:span text:style-name="T22">IP 總數</text:span></text:p>
            </table:table-cell>
            <table:table-cell table:style-name="表格14.A1" office:value-type="string">
              <text:p text:style-name="P12"><text:span text:style-name="T22">可用主機</text:span></text:p>
            </table:table-cell>
            <table:table-cell table:style-name="表格14.A1" office:value-type="string">
              <text:p text:style-name="P12"><text:span text:style-name="T22">區塊步長</text:span></text:p>
            </table:table-cell>
            <table:table-cell table:style-name="表格14.A1" office:value-type="string">
              <text:p text:style-name="P12"><text:span text:style-name="T22">廣播尾數範例</text:span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15"><text:span text:style-name="T27">/24</text:span></text:p>
          </table:table-cell>
          <table:table-cell table:style-name="表格14.A2" office:value-type="string">
            <text:p text:style-name="P14"><text:span text:style-name="T27">8</text:span></text:p>
          </table:table-cell>
          <table:table-cell table:style-name="表格14.A2" office:value-type="string">
            <text:p text:style-name="P15"><text:span text:style-name="T27">256</text:span></text:p>
          </table:table-cell>
          <table:table-cell table:style-name="表格14.A2" office:value-type="string">
            <text:p text:style-name="P14"><text:span text:style-name="T5">254</text:span></text:p>
          </table:table-cell>
          <table:table-cell table:style-name="表格14.A2" office:value-type="string">
            <text:p text:style-name="P15"><text:span text:style-name="T27">+256</text:span></text:p>
          </table:table-cell>
          <table:table-cell table:style-name="表格14.A2" office:value-type="string">
            <text:p text:style-name="P15"><text:span text:style-name="T27">255</text:span></text:p>
          </table:table-cell>
        </table:table-row>
        <table:table-row table:style-name="表格14.1">
          <table:table-cell table:style-name="表格14.A3" office:value-type="string">
            <text:p text:style-name="P15"><text:span text:style-name="T27">/25</text:span></text:p>
          </table:table-cell>
          <table:table-cell table:style-name="表格14.A3" office:value-type="string">
            <text:p text:style-name="P14"><text:span text:style-name="T27">7</text:span></text:p>
          </table:table-cell>
          <table:table-cell table:style-name="表格14.A3" office:value-type="string">
            <text:p text:style-name="P15"><text:span text:style-name="T27">128</text:span></text:p>
          </table:table-cell>
          <table:table-cell table:style-name="表格14.A3" office:value-type="string">
            <text:p text:style-name="P14"><text:span text:style-name="T5">126</text:span></text:p>
          </table:table-cell>
          <table:table-cell table:style-name="表格14.A3" office:value-type="string">
            <text:p text:style-name="P15"><text:span text:style-name="T27">+128</text:span></text:p>
          </table:table-cell>
          <table:table-cell table:style-name="表格14.A3" office:value-type="string">
            <text:p text:style-name="P15"><text:span text:style-name="T27">127, 255</text:span></text:p>
          </table:table-cell>
        </table:table-row>
        <table:table-row table:style-name="表格14.1">
          <table:table-cell table:style-name="表格14.A2" office:value-type="string">
            <text:p text:style-name="P15"><text:span text:style-name="T27">/26</text:span></text:p>
          </table:table-cell>
          <table:table-cell table:style-name="表格14.A2" office:value-type="string">
            <text:p text:style-name="P14"><text:span text:style-name="T27">6</text:span></text:p>
          </table:table-cell>
          <table:table-cell table:style-name="表格14.A2" office:value-type="string">
            <text:p text:style-name="P15"><text:span text:style-name="T27">64</text:span></text:p>
          </table:table-cell>
          <table:table-cell table:style-name="表格14.A2" office:value-type="string">
            <text:p text:style-name="P14"><text:span text:style-name="T5">62</text:span></text:p>
          </table:table-cell>
          <table:table-cell table:style-name="表格14.A2" office:value-type="string">
            <text:p text:style-name="P15"><text:span text:style-name="T27">+64</text:span></text:p>
          </table:table-cell>
          <table:table-cell table:style-name="表格14.A2" office:value-type="string">
            <text:p text:style-name="P15"><text:span text:style-name="T27">63, 127, 191, 255</text:span></text:p>
          </table:table-cell>
        </table:table-row>
        <table:table-row table:style-name="表格14.1">
          <table:table-cell table:style-name="表格14.A3" office:value-type="string">
            <text:p text:style-name="P15"><text:span text:style-name="T27">/27</text:span></text:p>
          </table:table-cell>
          <table:table-cell table:style-name="表格14.A3" office:value-type="string">
            <text:p text:style-name="P14"><text:span text:style-name="T27">5</text:span></text:p>
          </table:table-cell>
          <table:table-cell table:style-name="表格14.A3" office:value-type="string">
            <text:p text:style-name="P15"><text:span text:style-name="T27">32</text:span></text:p>
          </table:table-cell>
          <table:table-cell table:style-name="表格14.A3" office:value-type="string">
            <text:p text:style-name="P14"><text:span text:style-name="T5">30</text:span></text:p>
          </table:table-cell>
          <table:table-cell table:style-name="表格14.A3" office:value-type="string">
            <text:p text:style-name="P15"><text:span text:style-name="T27">+32</text:span></text:p>
          </table:table-cell>
          <table:table-cell table:style-name="表格14.A3" office:value-type="string">
            <text:p text:style-name="P15"><text:span text:style-name="T27">31, 63, 95 …</text:span></text:p>
          </table:table-cell>
        </table:table-row>
        <table:table-row table:style-name="表格14.1">
          <table:table-cell table:style-name="表格14.A2" office:value-type="string">
            <text:p text:style-name="P15"><text:span text:style-name="T27">/28</text:span></text:p>
          </table:table-cell>
          <table:table-cell table:style-name="表格14.A2" office:value-type="string">
            <text:p text:style-name="P14"><text:span text:style-name="T27">4</text:span></text:p>
          </table:table-cell>
          <table:table-cell table:style-name="表格14.A2" office:value-type="string">
            <text:p text:style-name="P15"><text:span text:style-name="T27">16</text:span></text:p>
          </table:table-cell>
          <table:table-cell table:style-name="表格14.A2" office:value-type="string">
            <text:p text:style-name="P14"><text:span text:style-name="T5">14</text:span></text:p>
          </table:table-cell>
          <table:table-cell table:style-name="表格14.A2" office:value-type="string">
            <text:p text:style-name="P15"><text:span text:style-name="T27">+16</text:span></text:p>
          </table:table-cell>
          <table:table-cell table:style-name="表格14.A2" office:value-type="string">
            <text:p text:style-name="P15"><text:span text:style-name="T27">15, 31, 47 …</text:span></text:p>
          </table:table-cell>
        </table:table-row>
        <table:table-row table:style-name="表格14.1">
          <table:table-cell table:style-name="表格14.A3" office:value-type="string">
            <text:p text:style-name="P15"><text:span text:style-name="T27">/29</text:span></text:p>
          </table:table-cell>
          <table:table-cell table:style-name="表格14.A3" office:value-type="string">
            <text:p text:style-name="P14"><text:span text:style-name="T27">3</text:span></text:p>
          </table:table-cell>
          <table:table-cell table:style-name="表格14.A3" office:value-type="string">
            <text:p text:style-name="P15"><text:span text:style-name="T27">8</text:span></text:p>
          </table:table-cell>
          <table:table-cell table:style-name="表格14.A3" office:value-type="string">
            <text:p text:style-name="P14"><text:span text:style-name="T5">6</text:span></text:p>
          </table:table-cell>
          <table:table-cell table:style-name="表格14.A3" office:value-type="string">
            <text:p text:style-name="P15"><text:span text:style-name="T27">+8</text:span></text:p>
          </table:table-cell>
          <table:table-cell table:style-name="表格14.A3" office:value-type="string">
            <text:p text:style-name="P15"><text:span text:style-name="T27">7, 15, 23 …</text:span></text:p>
          </table:table-cell>
        </table:table-row>
        <table:table-row table:style-name="表格14.1">
          <table:table-cell table:style-name="表格14.A2" office:value-type="string">
            <text:p text:style-name="P15"><text:span text:style-name="T27">/30</text:span></text:p>
          </table:table-cell>
          <table:table-cell table:style-name="表格14.A2" office:value-type="string">
            <text:p text:style-name="P14"><text:span text:style-name="T27">2</text:span></text:p>
          </table:table-cell>
          <table:table-cell table:style-name="表格14.A2" office:value-type="string">
            <text:p text:style-name="P15"><text:span text:style-name="T27">4</text:span></text:p>
          </table:table-cell>
          <table:table-cell table:style-name="表格14.A2" office:value-type="string">
            <text:p text:style-name="P14"><text:span text:style-name="T5">2</text:span></text:p>
          </table:table-cell>
          <table:table-cell table:style-name="表格14.A2" office:value-type="string">
            <text:p text:style-name="P15"><text:span text:style-name="T27">+4</text:span></text:p>
          </table:table-cell>
          <table:table-cell table:style-name="表格14.A2" office:value-type="string">
            <text:p text:style-name="P15"><text:span text:style-name="T27">3, 7, 11 …</text:span>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9"><text:span text:style-name="T38">例外 /31：</text:span><text:span text:style-name="T28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3" text:outline-level="3"><text:span text:style-name="T34">▍</text:span><text:span text:style-name="T35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13"><text:span text:style-name="T24">比較項目</text:span></text:p>
            </table:table-cell>
            <table:table-cell table:style-name="表格15.A1" office:value-type="string">
              <text:p text:style-name="P13"><text:span text:style-name="T24">TCP（穩定）</text:span></text:p>
            </table:table-cell>
            <table:table-cell table:style-name="表格15.A1" office:value-type="string">
              <text:p text:style-name="P13"><text:span text:style-name="T24">UDP（快速）</text:span>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15"><text:span text:style-name="T30">連線方式</text:span></text:p>
          </table:table-cell>
          <table:table-cell table:style-name="表格15.A2" office:value-type="string">
            <text:p text:style-name="P15"><text:span text:style-name="T30">三次握手才開始</text:span></text:p>
          </table:table-cell>
          <table:table-cell table:style-name="表格15.A2" office:value-type="string">
            <text:p text:style-name="P15"><text:span text:style-name="T30">無連線，直接送</text:span></text:p>
          </table:table-cell>
        </table:table-row>
        <table:table-row table:style-name="表格15.1">
          <table:table-cell table:style-name="表格15.A3" office:value-type="string">
            <text:p text:style-name="P15"><text:span text:style-name="T30">可靠性</text:span></text:p>
          </table:table-cell>
          <table:table-cell table:style-name="表格15.A3" office:value-type="string">
            <text:p text:style-name="P15"><text:span text:style-name="T30">保證送達、會重傳</text:span></text:p>
          </table:table-cell>
          <table:table-cell table:style-name="表格15.A3" office:value-type="string">
            <text:p text:style-name="P15"><text:span text:style-name="T30">不保證、不重傳</text:span></text:p>
          </table:table-cell>
        </table:table-row>
        <table:table-row table:style-name="表格15.1">
          <table:table-cell table:style-name="表格15.A2" office:value-type="string">
            <text:p text:style-name="P15"><text:span text:style-name="T30">順序</text:span></text:p>
          </table:table-cell>
          <table:table-cell table:style-name="表格15.A2" office:value-type="string">
            <text:p text:style-name="P15"><text:span text:style-name="T30">保證順序</text:span></text:p>
          </table:table-cell>
          <table:table-cell table:style-name="表格15.A2" office:value-type="string">
            <text:p text:style-name="P15"><text:span text:style-name="T30">不保證順序</text:span><text:soft-page-break/></text:p>
          </table:table-cell>
        </table:table-row>
        <table:table-row table:style-name="表格15.1">
          <table:table-cell table:style-name="表格15.A3" office:value-type="string">
            <text:p text:style-name="P15"><text:span text:style-name="T30">速度</text:span></text:p>
          </table:table-cell>
          <table:table-cell table:style-name="表格15.A3" office:value-type="string">
            <text:p text:style-name="P15"><text:span text:style-name="T30">較慢（有控制機制）</text:span></text:p>
          </table:table-cell>
          <table:table-cell table:style-name="表格15.A3" office:value-type="string">
            <text:p text:style-name="P15"><text:span text:style-name="T30">較快（無額外開銷）</text:span></text:p>
          </table:table-cell>
        </table:table-row>
        <table:table-row table:style-name="表格15.1">
          <table:table-cell table:style-name="表格15.A2" office:value-type="string">
            <text:p text:style-name="P15"><text:span text:style-name="T30">適用</text:span></text:p>
          </table:table-cell>
          <table:table-cell table:style-name="表格15.A2" office:value-type="string">
            <text:p text:style-name="P15"><text:span text:style-name="T30">網頁、Email、FTP、檔案</text:span></text:p>
          </table:table-cell>
          <table:table-cell table:style-name="表格15.A2" office:value-type="string">
            <text:p text:style-name="P15"><text:span text:style-name="T30">串流、遊戲、VoIP、DNS</text:span></text:p>
          </table:table-cell>
        </table:table-row>
        <table:table-row table:style-name="表格15.1">
          <table:table-cell table:style-name="表格15.A3" office:value-type="string">
            <text:p text:style-name="P15"><text:span text:style-name="T30">一句話</text:span></text:p>
          </table:table-cell>
          <table:table-cell table:style-name="表格15.A3" office:value-type="string">
            <text:p text:style-name="P15"><text:span text:style-name="T37">「穩定優先」</text:span></text:p>
          </table:table-cell>
          <table:table-cell table:style-name="表格15.A3" office:value-type="string">
            <text:p text:style-name="P15"><text:span text:style-name="T6">「速度優先」</text:span></text:p>
          </table:table-cell>
        </table:table-row>
      </table:table>
      <text:h text:style-name="P3" text:outline-level="3"><text:span text:style-name="T34">▍</text:span><text:span text:style-name="T35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13"><text:span text:style-name="T22">比較項目</text:span></text:p>
            </table:table-cell>
            <table:table-cell table:style-name="表格16.A1" office:value-type="string">
              <text:p text:style-name="P13"><text:span text:style-name="T22">✗ IPv4 問題</text:span></text:p>
            </table:table-cell>
            <table:table-cell table:style-name="表格16.A1" office:value-type="string">
              <text:p text:style-name="P13"><text:span text:style-name="T22">✓ IPv6 改進</text:span>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15"><text:span text:style-name="T27">位址長度</text:span></text:p>
          </table:table-cell>
          <table:table-cell table:style-name="表格16.A2" office:value-type="string">
            <text:p text:style-name="P15"><text:span text:style-name="T27">32 bit，約 43 億個，已不足</text:span></text:p>
          </table:table-cell>
          <table:table-cell table:style-name="表格16.A2" office:value-type="string">
            <text:p text:style-name="P15"><text:span text:style-name="T27">128 bit，約 3.4×10³⁸，近乎無限</text:span></text:p>
          </table:table-cell>
        </table:table-row>
        <table:table-row table:style-name="表格16.1">
          <table:table-cell table:style-name="表格16.A3" office:value-type="string">
            <text:p text:style-name="P15"><text:span text:style-name="T27">NAT</text:span></text:p>
          </table:table-cell>
          <table:table-cell table:style-name="表格16.A3" office:value-type="string">
            <text:p text:style-name="P15"><text:span text:style-name="T27">需 NAT 共用 IP，破壞 E2E</text:span></text:p>
          </table:table-cell>
          <table:table-cell table:style-name="表格16.A3" office:value-type="string">
            <text:p text:style-name="P15"><text:span text:style-name="T27">每裝置獨立公開 IP，恢復 E2E</text:span></text:p>
          </table:table-cell>
        </table:table-row>
        <table:table-row table:style-name="表格16.1">
          <table:table-cell table:style-name="表格16.A2" office:value-type="string">
            <text:p text:style-name="P15"><text:span text:style-name="T27">安全性</text:span></text:p>
          </table:table-cell>
          <table:table-cell table:style-name="表格16.A2" office:value-type="string">
            <text:p text:style-name="P15"><text:span text:style-name="T27">無內建加密／驗證</text:span></text:p>
          </table:table-cell>
          <table:table-cell table:style-name="表格16.A2" office:value-type="string">
            <text:p text:style-name="P15"><text:span text:style-name="T27">支援 IPsec（RFC 6434 後改建議）</text:span></text:p>
          </table:table-cell>
        </table:table-row>
        <table:table-row table:style-name="表格16.1">
          <table:table-cell table:style-name="表格16.A3" office:value-type="string">
            <text:p text:style-name="P15"><text:span text:style-name="T27">Header</text:span></text:p>
          </table:table-cell>
          <table:table-cell table:style-name="表格16.A3" office:value-type="string">
            <text:p text:style-name="P15"><text:span text:style-name="T27">可變長度含 Options，效率低</text:span></text:p>
          </table:table-cell>
          <table:table-cell table:style-name="表格16.A3" office:value-type="string">
            <text:p text:style-name="P15"><text:span text:style-name="T27">固定 40 bytes，轉送更快</text:span></text:p>
          </table:table-cell>
        </table:table-row>
        <table:table-row table:style-name="表格16.1">
          <table:table-cell table:style-name="表格16.A2" office:value-type="string">
            <text:p text:style-name="P15"><text:span text:style-name="T27">QoS</text:span></text:p>
          </table:table-cell>
          <table:table-cell table:style-name="表格16.A2" office:value-type="string">
            <text:p text:style-name="P15"><text:span text:style-name="T27">無法標記優先權</text:span></text:p>
          </table:table-cell>
          <table:table-cell table:style-name="表格16.A2" office:value-type="string">
            <text:p text:style-name="P15"><text:span text:style-name="T27">Flow Label 標記高優先流量</text:span></text:p>
          </table:table-cell>
        </table:table-row>
        <table:table-row table:style-name="表格16.1">
          <table:table-cell table:style-name="表格16.A3" office:value-type="string">
            <text:p text:style-name="P15"><text:span text:style-name="T27">廣播</text:span></text:p>
          </table:table-cell>
          <table:table-cell table:style-name="表格16.A3" office:value-type="string">
            <text:p text:style-name="P15"><text:span text:style-name="T27">Broadcast 發給所有人</text:span></text:p>
          </table:table-cell>
          <table:table-cell table:style-name="表格16.A3" office:value-type="string">
            <text:p text:style-name="P15"><text:span text:style-name="T27">改用 Multicast／Anycast</text:span></text:p>
          </table:table-cell>
        </table:table-row>
        <table:table-row table:style-name="表格16.1">
          <table:table-cell table:style-name="表格16.A2" office:value-type="string">
            <text:p text:style-name="P15"><text:span text:style-name="T27">IP 配置</text:span></text:p>
          </table:table-cell>
          <table:table-cell table:style-name="表格16.A2" office:value-type="string">
            <text:p text:style-name="P15"><text:span text:style-name="T27">手動或 DHCP，繁瑣</text:span></text:p>
          </table:table-cell>
          <table:table-cell table:style-name="表格16.A2" office:value-type="string">
            <text:p text:style-name="P15"><text:span text:style-name="T27">SLAAC 無狀態自動配置</text:span></text:p>
          </table:table-cell>
        </table:table-row>
      </table:table>
      <text:h text:style-name="P3" text:outline-level="3"><text:span text:style-name="T34">▍</text:span><text:span text:style-name="T35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13"><text:span text:style-name="T22">丟包偵測</text:span></text:p>
            </table:table-cell>
            <table:table-cell table:style-name="表格17.A1" office:value-type="string">
              <text:p text:style-name="P13"><text:span text:style-name="T22">代表意義</text:span></text:p>
            </table:table-cell>
            <table:table-cell table:style-name="表格17.A1" office:value-type="string">
              <text:p text:style-name="P13"><text:span text:style-name="T22">ssthresh</text:span></text:p>
            </table:table-cell>
            <table:table-cell table:style-name="表格17.A1" office:value-type="string">
              <text:p text:style-name="P13"><text:span text:style-name="T22">cwnd</text:span></text:p>
            </table:table-cell>
            <table:table-cell table:style-name="表格17.A1" office:value-type="string">
              <text:p text:style-name="P13"><text:span text:style-name="T22">下一階段</text:span>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15"><text:span text:style-name="T27">Timeout（逾時）</text:span></text:p>
          </table:table-cell>
          <table:table-cell table:style-name="表格17.A2" office:value-type="string">
            <text:p text:style-name="P15"><text:span text:style-name="T27">網路嚴重擁塞</text:span></text:p>
          </table:table-cell>
          <table:table-cell table:style-name="表格17.A2" office:value-type="string">
            <text:p text:style-name="P15"><text:span text:style-name="T27">= cwnd / 2</text:span></text:p>
          </table:table-cell>
          <table:table-cell table:style-name="表格17.A2" office:value-type="string">
            <text:p text:style-name="P15"><text:span text:style-name="T40">重設為 1</text:span></text:p>
          </table:table-cell>
          <table:table-cell table:style-name="表格17.A2" office:value-type="string">
            <text:p text:style-name="P15"><text:span text:style-name="T27">重回 Slow Start</text:span></text:p>
          </table:table-cell>
        </table:table-row>
        <table:table-row table:style-name="表格17.1">
          <table:table-cell table:style-name="表格17.A3" office:value-type="string">
            <text:p text:style-name="P15"><text:span text:style-name="T27">3 個重複 ACK</text:span></text:p>
          </table:table-cell>
          <table:table-cell table:style-name="表格17.A3" office:value-type="string">
            <text:p text:style-name="P15"><text:span text:style-name="T27">單一封包遺失</text:span></text:p>
          </table:table-cell>
          <table:table-cell table:style-name="表格17.A3" office:value-type="string">
            <text:p text:style-name="P15"><text:span text:style-name="T27">= cwnd / 2</text:span></text:p>
          </table:table-cell>
          <table:table-cell table:style-name="表格17.A3" office:value-type="string">
            <text:p text:style-name="P15"><text:span text:style-name="T5">= ssthresh（減半）</text:span></text:p>
          </table:table-cell>
          <table:table-cell table:style-name="表格17.A3" office:value-type="string">
            <text:p text:style-name="P15"><text:span text:style-name="T27">續 Congestion Avoidance</text:span></text:p>
          </table:table-cell>
        </table:table-row>
      </table:table>
      <text:h text:style-name="P3" text:outline-level="3"><text:span text:style-name="T34">▍</text:span><text:span text:style-name="T35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12"><text:span text:style-name="T22">順序</text:span></text:p>
            </table:table-cell>
            <table:table-cell table:style-name="表格18.A1" office:value-type="string">
              <text:p text:style-name="P12"><text:span text:style-name="T22">屬性</text:span></text:p>
            </table:table-cell>
            <table:table-cell table:style-name="表格18.A1" office:value-type="string">
              <text:p text:style-name="P12"><text:span text:style-name="T22">規則／備註</text:span>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14"><text:span text:style-name="T27">①</text:span></text:p>
          </table:table-cell>
          <table:table-cell table:style-name="表格18.A2" office:value-type="string">
            <text:p text:style-name="P15"><text:span text:style-name="T27">Weight</text:span></text:p>
          </table:table-cell>
          <table:table-cell table:style-name="表格18.A2" office:value-type="string">
            <text:p text:style-name="P15"><text:span text:style-name="T27">數值越高越優先 ⚠️ Cisco 私有，他牌無此屬性</text:span></text:p>
          </table:table-cell>
        </table:table-row>
        <table:table-row table:style-name="表格18.1">
          <table:table-cell table:style-name="表格18.A3" office:value-type="string">
            <text:p text:style-name="P14"><text:span text:style-name="T27">②</text:span></text:p>
          </table:table-cell>
          <table:table-cell table:style-name="表格18.A3" office:value-type="string">
            <text:p text:style-name="P15"><text:span text:style-name="T5">Local Preference</text:span></text:p>
          </table:table-cell>
          <table:table-cell table:style-name="表格18.A3" office:value-type="string">
            <text:p text:style-name="P15"><text:span text:style-name="T5">數值越高越優先 ✅ 最重要的「通用」屬性</text:span></text:p>
          </table:table-cell>
        </table:table-row>
        <table:table-row table:style-name="表格18.1">
          <table:table-cell table:style-name="表格18.A2" office:value-type="string">
            <text:p text:style-name="P14"><text:span text:style-name="T27">③</text:span></text:p>
          </table:table-cell>
          <table:table-cell table:style-name="表格18.A2" office:value-type="string">
            <text:p text:style-name="P15"><text:span text:style-name="T27">本地產生</text:span></text:p>
          </table:table-cell>
          <table:table-cell table:style-name="表格18.A2" office:value-type="string">
            <text:p text:style-name="P15"><text:span text:style-name="T27">network / aggregate 產生的路由優先</text:span></text:p>
          </table:table-cell>
        </table:table-row>
        <table:table-row table:style-name="表格18.1">
          <table:table-cell table:style-name="表格18.A3" office:value-type="string">
            <text:p text:style-name="P14"><text:span text:style-name="T27">④</text:span></text:p>
          </table:table-cell>
          <table:table-cell table:style-name="表格18.A3" office:value-type="string">
            <text:p text:style-name="P15"><text:span text:style-name="T27">AS-PATH</text:span></text:p>
          </table:table-cell>
          <table:table-cell table:style-name="表格18.A3" office:value-type="string">
            <text:p text:style-name="P15"><text:span text:style-name="T27">路徑越短（經過 AS 越少）越優先</text:span></text:p>
          </table:table-cell>
        </table:table-row>
        <table:table-row table:style-name="表格18.1">
          <table:table-cell table:style-name="表格18.A2" office:value-type="string">
            <text:p text:style-name="P14"><text:span text:style-name="T27">⑤</text:span></text:p>
          </table:table-cell>
          <table:table-cell table:style-name="表格18.A2" office:value-type="string">
            <text:p text:style-name="P15"><text:span text:style-name="T27">Origin</text:span></text:p>
          </table:table-cell>
          <table:table-cell table:style-name="表格18.A2" office:value-type="string">
            <text:p text:style-name="P15"><text:span text:style-name="T27">IGP &gt; EGP &gt; Incomplete</text:span></text:p>
          </table:table-cell>
        </table:table-row>
        <table:table-row table:style-name="表格18.1">
          <table:table-cell table:style-name="表格18.A3" office:value-type="string">
            <text:p text:style-name="P14"><text:span text:style-name="T27">⑥</text:span></text:p>
          </table:table-cell>
          <table:table-cell table:style-name="表格18.A3" office:value-type="string">
            <text:p text:style-name="P15"><text:span text:style-name="T27">MED</text:span></text:p>
          </table:table-cell>
          <table:table-cell table:style-name="表格18.A3" office:value-type="string">
            <text:p text:style-name="P15"><text:span text:style-name="T27">數值越小越優先（只比同一 AS 來的路由）</text:span></text:p>
          </table:table-cell>
        </table:table-row>
        <table:table-row table:style-name="表格18.1">
          <table:table-cell table:style-name="表格18.A2" office:value-type="string">
            <text:p text:style-name="P14"><text:span text:style-name="T27">⑦</text:span></text:p>
          </table:table-cell>
          <table:table-cell table:style-name="表格18.A2" office:value-type="string">
            <text:p text:style-name="P15"><text:span text:style-name="T27">eBGP vs iBGP</text:span></text:p>
          </table:table-cell>
          <table:table-cell table:style-name="表格18.A2" office:value-type="string">
            <text:p text:style-name="P15"><text:span text:style-name="T27">eBGP 優先於 iBGP</text:span></text:p>
          </table:table-cell>
        </table:table-row>
        <table:table-row table:style-name="表格18.1">
          <table:table-cell table:style-name="表格18.A3" office:value-type="string">
            <text:p text:style-name="P14"><text:span text:style-name="T27">⑧</text:span></text:p>
          </table:table-cell>
          <table:table-cell table:style-name="表格18.A3" office:value-type="string">
            <text:p text:style-name="P15"><text:span text:style-name="T27">IGP cost</text:span></text:p>
          </table:table-cell>
          <table:table-cell table:style-name="表格18.A3" office:value-type="string">
            <text:p text:style-name="P15"><text:span text:style-name="T27">到 next-hop 距離越小越優先</text:span></text:p>
          </table:table-cell>
        </table:table-row>
        <table:table-row table:style-name="表格18.1">
          <table:table-cell table:style-name="表格18.A2" office:value-type="string">
            <text:p text:style-name="P14"><text:span text:style-name="T27">⑨</text:span></text:p>
          </table:table-cell>
          <table:table-cell table:style-name="表格18.A2" office:value-type="string">
            <text:p text:style-name="P15"><text:span text:style-name="T27">Router ID</text:span></text:p>
          </table:table-cell>
          <table:table-cell table:style-name="表格18.A2" office:value-type="string">
            <text:p text:style-name="P15"><text:span text:style-name="T27">Router ID 最小者優先（最後決勝點）</text:span></text:p>
          </table:table-cell>
        </table:table-row>
      </table:table>
      <text:h text:style-name="P3" text:outline-level="3"><text:span text:style-name="T34">▍</text:span><text:span text:style-name="T35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13"><text:span text:style-name="T22">類型</text:span></text:p>
            </table:table-cell>
            <table:table-cell table:style-name="表格19.A1" office:value-type="string">
              <text:p text:style-name="P13"><text:span text:style-name="T22">本質</text:span></text:p>
            </table:table-cell>
            <table:table-cell table:style-name="表格19.A1" office:value-type="string">
              <text:p text:style-name="P13"><text:span text:style-name="T22">核心記憶點</text:span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15"><text:span text:style-name="T27">Internal</text:span></text:p>
          </table:table-cell>
          <table:table-cell table:style-name="表格19.A2" office:value-type="string">
            <text:p text:style-name="P15"><text:span text:style-name="T27">不出 Area</text:span></text:p>
          </table:table-cell>
          <table:table-cell table:style-name="表格19.A2" office:value-type="string">
            <text:p text:style-name="P15"><text:span text:style-name="T27">只負責自己這一區，對外一無所知</text:span>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15"><text:span text:style-name="T27">Backbone</text:span></text:p>
          </table:table-cell>
          <table:table-cell table:style-name="表格19.A3" office:value-type="string">
            <text:p text:style-name="P15"><text:span text:style-name="T27">在 Area 0</text:span></text:p>
          </table:table-cell>
          <table:table-cell table:style-name="表格19.A3" office:value-type="string">
            <text:p text:style-name="P15"><text:span text:style-name="T27">城市主幹道節點，跨區流量必經</text:span></text:p>
          </table:table-cell>
        </table:table-row>
        <table:table-row table:style-name="表格19.1">
          <table:table-cell table:style-name="表格19.A2" office:value-type="string">
            <text:p text:style-name="P15"><text:span text:style-name="T27">ABR</text:span></text:p>
          </table:table-cell>
          <table:table-cell table:style-name="表格19.A2" office:value-type="string">
            <text:p text:style-name="P15"><text:span text:style-name="T27">跨 Area 橋樑</text:span></text:p>
          </table:table-cell>
          <table:table-cell table:style-name="表格19.A2" office:value-type="string">
            <text:p text:style-name="P15"><text:span text:style-name="T27">一端連 Area 0、一端連其他 Area，區域間唯一合法通道</text:span></text:p>
          </table:table-cell>
        </table:table-row>
        <table:table-row table:style-name="表格19.1">
          <table:table-cell table:style-name="表格19.A3" office:value-type="string">
            <text:p text:style-name="P15"><text:span text:style-name="T27">ASBR</text:span></text:p>
          </table:table-cell>
          <table:table-cell table:style-name="表格19.A3" office:value-type="string">
            <text:p text:style-name="P15"><text:span text:style-name="T27">跨 AS 入口</text:span></text:p>
          </table:table-cell>
          <table:table-cell table:style-name="表格19.A3" office:value-type="string">
            <text:p text:style-name="P15"><text:span text:style-name="T27">把外部路由（BGP 等）帶進 OSPF，是對外的大門</text:span></text:p>
          </table:table-cell>
        </table:table-row>
      </table:table>
      <text:h text:style-name="P3" text:outline-level="3"><text:span text:style-name="T34">▍</text:span><text:span text:style-name="T35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B"/>
        <table:table-header-rows>
          <table:table-row table:style-name="表格20.1">
            <table:table-cell table:style-name="表格20.A1" office:value-type="string">
              <text:p text:style-name="P12"><text:span text:style-name="T22">能力</text:span></text:p>
            </table:table-cell>
            <table:table-cell table:style-name="表格20.A1" office:value-type="string">
              <text:p text:style-name="P12"><text:span text:style-name="T22">FW</text:span></text:p>
            </table:table-cell>
            <table:table-cell table:style-name="表格20.A1" office:value-type="string">
              <text:p text:style-name="P12"><text:span text:style-name="T22">WAF</text:span></text:p>
            </table:table-cell>
            <table:table-cell table:style-name="表格20.A1" office:value-type="string">
              <text:p text:style-name="P12"><text:span text:style-name="T22">NGFW</text:span>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15"><text:span text:style-name="T27">IP / Port 過濾</text:span></text:p>
          </table:table-cell>
          <table:table-cell table:style-name="表格20.A2" office:value-type="string">
            <text:p text:style-name="P14"><text:span text:style-name="T44">○</text:span></text:p>
          </table:table-cell>
          <table:table-cell table:style-name="表格20.A2" office:value-type="string">
            <text:p text:style-name="P14"><text:span text:style-name="T44">○</text:span></text:p>
          </table:table-cell>
          <table:table-cell table:style-name="表格20.A2" office:value-type="string">
            <text:p text:style-name="P14"><text:span text:style-name="T44">○</text:span></text:p>
          </table:table-cell>
        </table:table-row>
        <table:table-row table:style-name="表格20.1">
          <table:table-cell table:style-name="表格20.A3" office:value-type="string">
            <text:p text:style-name="P15"><text:span text:style-name="T27">HTTP 內容檢查</text:span></text:p>
          </table:table-cell>
          <table:table-cell table:style-name="表格20.A3" office:value-type="string">
            <text:p text:style-name="P14"><text:span text:style-name="T42">✗</text:span></text:p>
          </table:table-cell>
          <table:table-cell table:style-name="表格20.A3" office:value-type="string">
            <text:p text:style-name="P14"><text:span text:style-name="T44">○</text:span></text:p>
          </table:table-cell>
          <table:table-cell table:style-name="表格20.A3" office:value-type="string">
            <text:p text:style-name="P14"><text:span text:style-name="T44">○</text:span></text:p>
          </table:table-cell>
        </table:table-row>
        <table:table-row table:style-name="表格20.1">
          <table:table-cell table:style-name="表格20.A2" office:value-type="string">
            <text:p text:style-name="P15"><text:span text:style-name="T27">DPI 深度檢查</text:span></text:p>
          </table:table-cell>
          <table:table-cell table:style-name="表格20.A2" office:value-type="string">
            <text:p text:style-name="P14"><text:span text:style-name="T42">✗</text:span></text:p>
          </table:table-cell>
          <table:table-cell table:style-name="表格20.A2" office:value-type="string">
            <text:p text:style-name="P14"><text:span text:style-name="T42">✗</text:span></text:p>
          </table:table-cell>
          <table:table-cell table:style-name="表格20.A2" office:value-type="string">
            <text:p text:style-name="P14"><text:span text:style-name="T44">○</text:span></text:p>
          </table:table-cell>
        </table:table-row>
        <table:table-row table:style-name="表格20.1">
          <table:table-cell table:style-name="表格20.A3" office:value-type="string">
            <text:p text:style-name="P15"><text:span text:style-name="T27">App 識別 / IPS</text:span></text:p>
          </table:table-cell>
          <table:table-cell table:style-name="表格20.A3" office:value-type="string">
            <text:p text:style-name="P14"><text:span text:style-name="T42">✗</text:span></text:p>
          </table:table-cell>
          <table:table-cell table:style-name="表格20.A3" office:value-type="string">
            <text:p text:style-name="P14"><text:span text:style-name="T42">✗</text:span></text:p>
          </table:table-cell>
          <table:table-cell table:style-name="表格20.A3" office:value-type="string">
            <text:p text:style-name="P14"><text:span text:style-name="T44">○</text:span></text:p>
          </table:table-cell>
        </table:table-row>
        <table:table-row table:style-name="表格20.1">
          <table:table-cell table:style-name="表格20.A2" office:value-type="string">
            <text:p text:style-name="P15"><text:span text:style-name="T27">OSI 層</text:span></text:p>
          </table:table-cell>
          <table:table-cell table:style-name="表格20.A2" office:value-type="string">
            <text:p text:style-name="P14"><text:span text:style-name="T27">L3 / L4</text:span></text:p>
          </table:table-cell>
          <table:table-cell table:style-name="表格20.A2" office:value-type="string">
            <text:p text:style-name="P14"><text:span text:style-name="T5">L7</text:span></text:p>
          </table:table-cell>
          <table:table-cell table:style-name="表格20.A2" office:value-type="string">
            <text:p text:style-name="P14"><text:span text:style-name="T27">L3–L7</text:span></text:p>
          </table:table-cell>
        </table:table-row>
      </table:table>
      <text:h text:style-name="P3" text:outline-level="3"><text:span text:style-name="T34">▍</text:span><text:span text:style-name="T35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13"><text:span text:style-name="T22">工具</text:span></text:p>
            </table:table-cell>
            <table:table-cell table:style-name="表格21.A1" office:value-type="string">
              <text:p text:style-name="P13"><text:span text:style-name="T22">角色</text:span></text:p>
            </table:table-cell>
            <table:table-cell table:style-name="表格21.A1" office:value-type="string">
              <text:p text:style-name="P13"><text:span text:style-name="T22">關鍵差異</text:span>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15"><text:span text:style-name="T27">Firewall</text:span></text:p>
          </table:table-cell>
          <table:table-cell table:style-name="表格21.A2" office:value-type="string">
            <text:p text:style-name="P15"><text:span text:style-name="T27">大門警衛</text:span></text:p>
          </table:table-cell>
          <table:table-cell table:style-name="表格21.A2" office:value-type="string">
            <text:p text:style-name="P15"><text:span text:style-name="T27">依 IP / Port / 協定過濾，不做行為分析</text:span></text:p>
          </table:table-cell>
        </table:table-row>
        <table:table-row table:style-name="表格21.1">
          <table:table-cell table:style-name="表格21.A3" office:value-type="string">
            <text:p text:style-name="P15"><text:span text:style-name="T27">IDS</text:span></text:p>
          </table:table-cell>
          <table:table-cell table:style-name="表格21.A3" office:value-type="string">
            <text:p text:style-name="P15"><text:span text:style-name="T27">監視器（只看）</text:span></text:p>
          </table:table-cell>
          <table:table-cell table:style-name="表格21.A3" office:value-type="string">
            <text:p text:style-name="P15"><text:span text:style-name="T27">偵測異常 → 只發警報，不阻擋</text:span></text:p>
          </table:table-cell>
        </table:table-row>
        <table:table-row table:style-name="表格21.1">
          <table:table-cell table:style-name="表格21.A2" office:value-type="string">
            <text:p text:style-name="P15"><text:span text:style-name="T27">IPS</text:span></text:p>
          </table:table-cell>
          <table:table-cell table:style-name="表格21.A2" office:value-type="string">
            <text:p text:style-name="P15"><text:span text:style-name="T27">監視器＋警衛</text:span></text:p>
          </table:table-cell>
          <table:table-cell table:style-name="表格21.A2" office:value-type="string">
            <text:p text:style-name="P15"><text:span text:style-name="T27">偵測異常 → 自動阻擋（IDS 全功能＋阻擋）</text:span></text:p>
          </table:table-cell>
        </table:table-row>
        <table:table-row table:style-name="表格21.1">
          <table:table-cell table:style-name="表格21.A3" office:value-type="string">
            <text:p text:style-name="P15"><text:span text:style-name="T27">HIDS</text:span></text:p>
          </table:table-cell>
          <table:table-cell table:style-name="表格21.A3" office:value-type="string">
            <text:p text:style-name="P15"><text:span text:style-name="T27">主機型</text:span></text:p>
          </table:table-cell>
          <table:table-cell table:style-name="表格21.A3" office:value-type="string">
            <text:p text:style-name="P15"><text:span text:style-name="T27">看主機 Log／系統行為</text:span></text:p>
          </table:table-cell>
        </table:table-row>
        <table:table-row table:style-name="表格21.1">
          <table:table-cell table:style-name="表格21.A2" office:value-type="string">
            <text:p text:style-name="P15"><text:span text:style-name="T27">NIDS</text:span></text:p>
          </table:table-cell>
          <table:table-cell table:style-name="表格21.A2" office:value-type="string">
            <text:p text:style-name="P15"><text:span text:style-name="T27">網路型</text:span></text:p>
          </table:table-cell>
          <table:table-cell table:style-name="表格21.A2" office:value-type="string">
            <text:p text:style-name="P15"><text:span text:style-name="T27">看網路封包／流量</text:span></text:p>
          </table:table-cell>
        </table:table-row>
        <table:table-row table:style-name="表格21.1">
          <table:table-cell table:style-name="表格21.A3" office:value-type="string">
            <text:p text:style-name="P15"><text:span text:style-name="T27">SNMP</text:span></text:p>
          </table:table-cell>
          <table:table-cell table:style-name="表格21.A3" office:value-type="string">
            <text:p text:style-name="P15"><text:span text:style-name="T27">管理室</text:span></text:p>
          </table:table-cell>
          <table:table-cell table:style-name="表格21.A3" office:value-type="string">
            <text:p text:style-name="P15"><text:span text:style-name="T27">管理設備狀態（應用層／UDP）</text:span></text:p>
          </table:table-cell>
        </table:table-row>
        <table:table-row table:style-name="表格21.1">
          <table:table-cell table:style-name="表格21.A2" office:value-type="string">
            <text:p text:style-name="P15"><text:span text:style-name="T27">ICMP</text:span></text:p>
          </table:table-cell>
          <table:table-cell table:style-name="表格21.A2" office:value-type="string">
            <text:p text:style-name="P15"><text:span text:style-name="T27">網路測試員</text:span></text:p>
          </table:table-cell>
          <table:table-cell table:style-name="表格21.A2" office:value-type="string">
            <text:p text:style-name="P15"><text:span text:style-name="T27">診斷網路連線（網路層／Ping）</text:span></text:p>
          </table:table-cell>
        </table:table-row>
      </table:table>
      <text:h text:style-name="P3" text:outline-level="3"><text:span text:style-name="T34">▍</text:span><text:span text:style-name="T35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12"><text:span text:style-name="T22">口訣</text:span></text:p>
            </table:table-cell>
            <table:table-cell table:style-name="表格22.A1" office:value-type="string">
              <text:p text:style-name="P12"><text:span text:style-name="T22">IOC 類型</text:span></text:p>
            </table:table-cell>
            <table:table-cell table:style-name="表格22.A1" office:value-type="string">
              <text:p text:style-name="P12"><text:span text:style-name="T22">白話</text:span></text:p>
            </table:table-cell>
            <table:table-cell table:style-name="表格22.A1" office:value-type="string">
              <text:p text:style-name="P12"><text:span text:style-name="T22">對應防禦</text:span>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14"><text:span text:style-name="T48">網</text:span></text:p>
          </table:table-cell>
          <table:table-cell table:style-name="表格22.A2" office:value-type="string">
            <text:p text:style-name="P15"><text:span text:style-name="T27">惡意 Domain</text:span></text:p>
          </table:table-cell>
          <table:table-cell table:style-name="表格22.A2" office:value-type="string">
            <text:p text:style-name="P15"><text:span text:style-name="T27">釣魚網站網址</text:span></text:p>
          </table:table-cell>
          <table:table-cell table:style-name="表格22.A2" office:value-type="string">
            <text:p text:style-name="P15"><text:span text:style-name="T27">DNS 封鎖網域</text:span></text:p>
          </table:table-cell>
        </table:table-row>
        <table:table-row table:style-name="表格22.1">
          <table:table-cell table:style-name="表格22.A3" office:value-type="string">
            <text:p text:style-name="P14"><text:span text:style-name="T48">檔</text:span></text:p>
          </table:table-cell>
          <table:table-cell table:style-name="表格22.A3" office:value-type="string">
            <text:p text:style-name="P15"><text:span text:style-name="T27">惡意 Hash</text:span></text:p>
          </table:table-cell>
          <table:table-cell table:style-name="表格22.A3" office:value-type="string">
            <text:p text:style-name="P15"><text:span text:style-name="T27">惡意程式特徵碼（改名也認得）</text:span></text:p>
          </table:table-cell>
          <table:table-cell table:style-name="表格22.A3" office:value-type="string">
            <text:p text:style-name="P15"><text:span text:style-name="T27">防毒比對特徵</text:span></text:p>
          </table:table-cell>
        </table:table-row>
        <table:table-row table:style-name="表格22.1">
          <table:table-cell table:style-name="表格22.A2" office:value-type="string">
            <text:p text:style-name="P14"><text:span text:style-name="T48">連</text:span></text:p>
          </table:table-cell>
          <table:table-cell table:style-name="表格22.A2" office:value-type="string">
            <text:p text:style-name="P15"><text:span text:style-name="T27">惡意 IP</text:span></text:p>
          </table:table-cell>
          <table:table-cell table:style-name="表格22.A2" office:value-type="string">
            <text:p text:style-name="P15"><text:span text:style-name="T27">感染後對外異常連線目標</text:span></text:p>
          </table:table-cell>
          <table:table-cell table:style-name="表格22.A2" office:value-type="string">
            <text:p text:style-name="P15"><text:span text:style-name="T27">FW / NGFW 封鎖</text:span></text:p>
          </table:table-cell>
        </table:table-row>
        <table:table-row table:style-name="表格22.1">
          <table:table-cell table:style-name="表格22.A3" office:value-type="string">
            <text:p text:style-name="P14"><text:span text:style-name="T48">控</text:span></text:p>
          </table:table-cell>
          <table:table-cell table:style-name="表格22.A3" office:value-type="string">
            <text:p text:style-name="P15"><text:span text:style-name="T27">C2 Server</text:span></text:p>
          </table:table-cell>
          <table:table-cell table:style-name="表格22.A3" office:value-type="string">
            <text:p text:style-name="P15"><text:span text:style-name="T27">駭客遠端操控總部</text:span></text:p>
          </table:table-cell>
          <table:table-cell table:style-name="表格22.A3" office:value-type="string">
            <text:p text:style-name="P15"><text:span text:style-name="T27">SIEM / IDS 偵測</text:span>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9"><text:span text:style-name="T38">必記：</text:span><text:span text:style-name="T28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34">▍</text:span><text:span text:style-name="T35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13"><text:span text:style-name="T24">項目</text:span></text:p>
            </table:table-cell>
            <table:table-cell table:style-name="表格23.A1" office:value-type="string">
              <text:p text:style-name="P13"><text:span text:style-name="T24">Recursive 遞迴</text:span></text:p>
            </table:table-cell>
            <table:table-cell table:style-name="表格23.A1" office:value-type="string">
              <text:p text:style-name="P13"><text:span text:style-name="T24">Iterative 反覆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15"><text:span text:style-name="T30">口訣</text:span></text:p>
          </table:table-cell>
          <table:table-cell table:style-name="表格23.A2" office:value-type="string">
            <text:p text:style-name="P15"><text:span text:style-name="T37">代查到底</text:span></text:p>
          </table:table-cell>
          <table:table-cell table:style-name="表格23.A2" office:value-type="string">
            <text:p text:style-name="P15"><text:span text:style-name="T6">逐層詢問</text:span></text:p>
          </table:table-cell>
        </table:table-row>
        <table:table-row table:style-name="表格23.1">
          <table:table-cell table:style-name="表格23.A3" office:value-type="string">
            <text:p text:style-name="P15"><text:span text:style-name="T30">誰去問</text:span></text:p>
          </table:table-cell>
          <table:table-cell table:style-name="表格23.A3" office:value-type="string">
            <text:p text:style-name="P15"><text:span text:style-name="T30">DNS 伺服器代你問完</text:span></text:p>
          </table:table-cell>
          <table:table-cell table:style-name="表格23.A3" office:value-type="string">
            <text:p text:style-name="P15"><text:span text:style-name="T30">你自己逐層查詢</text:span></text:p>
          </table:table-cell>
        </table:table-row>
        <table:table-row table:style-name="表格23.1">
          <table:table-cell table:style-name="表格23.A2" office:value-type="string">
            <text:p text:style-name="P15"><text:span text:style-name="T30">問幾次</text:span></text:p>
          </table:table-cell>
          <table:table-cell table:style-name="表格23.A2" office:value-type="string">
            <text:p text:style-name="P15"><text:span text:style-name="T30">只問 1 次</text:span></text:p>
          </table:table-cell>
          <table:table-cell table:style-name="表格23.A2" office:value-type="string">
            <text:p text:style-name="P15"><text:span text:style-name="T30">每層各問一次，共多次</text:span></text:p>
          </table:table-cell>
        </table:table-row>
        <text:soft-page-break/>
        <table:table-row table:style-name="表格23.1">
          <table:table-cell table:style-name="表格23.A3" office:value-type="string">
            <text:p text:style-name="P15"><text:span text:style-name="T30">常見場合</text:span></text:p>
          </table:table-cell>
          <table:table-cell table:style-name="表格23.A3" office:value-type="string">
            <text:p text:style-name="P15"><text:span text:style-name="T30">一般使用者 → Local DNS</text:span></text:p>
          </table:table-cell>
          <table:table-cell table:style-name="表格23.A3" office:value-type="string">
            <text:p text:style-name="P15"><text:span text:style-name="T30">DNS 伺服器之間互查</text:span></text:p>
          </table:table-cell>
        </table:table-row>
      </table:table>
      <text:h text:style-name="P3" text:outline-level="3"><text:span text:style-name="T34">▍</text:span><text:span text:style-name="T35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13"><text:span text:style-name="T22">指標 / 名詞</text:span></text:p>
            </table:table-cell>
            <table:table-cell table:style-name="表格24.A1" office:value-type="string">
              <text:p text:style-name="P13"><text:span text:style-name="T22">意義</text:span></text:p>
            </table:table-cell>
            <table:table-cell table:style-name="表格24.A1" office:value-type="string">
              <text:p text:style-name="P13"><text:span text:style-name="T22">一句話記憶</text:span>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15"><text:span text:style-name="T27">RTO</text:span></text:p>
          </table:table-cell>
          <table:table-cell table:style-name="表格24.A2" office:value-type="string">
            <text:p text:style-name="P15"><text:span text:style-name="T27">Recovery Time Objective 復原時間目標</text:span></text:p>
          </table:table-cell>
          <table:table-cell table:style-name="表格24.A2" office:value-type="string">
            <text:p text:style-name="P15"><text:span text:style-name="T11">停機時間（能停多久）</text:span></text:p>
          </table:table-cell>
        </table:table-row>
        <table:table-row table:style-name="表格24.1">
          <table:table-cell table:style-name="表格24.A3" office:value-type="string">
            <text:p text:style-name="P15"><text:span text:style-name="T27">RPO</text:span></text:p>
          </table:table-cell>
          <table:table-cell table:style-name="表格24.A3" office:value-type="string">
            <text:p text:style-name="P15"><text:span text:style-name="T27">Recovery Point Objective 復原點目標</text:span></text:p>
          </table:table-cell>
          <table:table-cell table:style-name="表格24.A3" office:value-type="string">
            <text:p text:style-name="P15"><text:span text:style-name="T11">資料損失量（能丟幾小時）</text:span></text:p>
          </table:table-cell>
        </table:table-row>
        <table:table-row table:style-name="表格24.1">
          <table:table-cell table:style-name="表格24.A2" office:value-type="string">
            <text:p text:style-name="P15"><text:span text:style-name="T27">EDR</text:span></text:p>
          </table:table-cell>
          <table:table-cell table:style-name="表格24.A2" office:value-type="string">
            <text:p text:style-name="P15"><text:span text:style-name="T27">Endpoint Detection &amp; Response</text:span></text:p>
          </table:table-cell>
          <table:table-cell table:style-name="表格24.A2" office:value-type="string">
            <text:p text:style-name="P15"><text:span text:style-name="T27">自己買工具守（需內部資安人員）</text:span></text:p>
          </table:table-cell>
        </table:table-row>
        <table:table-row table:style-name="表格24.1">
          <table:table-cell table:style-name="表格24.A3" office:value-type="string">
            <text:p text:style-name="P15"><text:span text:style-name="T27">MDR</text:span></text:p>
          </table:table-cell>
          <table:table-cell table:style-name="表格24.A3" office:value-type="string">
            <text:p text:style-name="P15"><text:span text:style-name="T27">Managed Detection &amp; Response</text:span></text:p>
          </table:table-cell>
          <table:table-cell table:style-name="表格24.A3" office:value-type="string">
            <text:p text:style-name="P15"><text:span text:style-name="T27">請資安公司委外守（24／7，適合中小企業）</text:span></text:p>
          </table:table-cell>
        </table:table-row>
      </table:table>
      <text:h text:style-name="P3" text:outline-level="3"><text:span text:style-name="T34">▍</text:span><text:span text:style-name="T35"> ⑫ 封包欄位速記（第二篇）</text:span></text:h>
      <table:table table:name="表格25" table:style-name="表格25">
        <table:table-column table:style-name="表格25.A" table:number-columns-repeated="3"/>
        <table:table-column table:style-name="表格25.D"/>
        <table:table-header-rows>
          <table:table-row table:style-name="表格25.1">
            <table:table-cell table:style-name="表格25.A1" office:value-type="string">
              <text:p text:style-name="P12"><text:span text:style-name="T22">Protocol 值</text:span></text:p>
            </table:table-cell>
            <table:table-cell table:style-name="表格25.A1" office:value-type="string">
              <text:p text:style-name="P12"><text:span text:style-name="T22">DF Flag</text:span></text:p>
            </table:table-cell>
            <table:table-cell table:style-name="表格25.A1" office:value-type="string">
              <text:p text:style-name="P12"><text:span text:style-name="T22">MF Flag</text:span></text:p>
            </table:table-cell>
            <table:table-cell table:style-name="表格25.A1" office:value-type="string">
              <text:p text:style-name="P12"><text:span text:style-name="T22">關鍵公式</text:span>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15"><text:span text:style-name="T27">ICMP=1 / TCP=6 / UDP=17</text:span></text:p>
          </table:table-cell>
          <table:table-cell table:style-name="表格25.A2" office:value-type="string">
            <text:p text:style-name="P15"><text:span text:style-name="T27">DF=1：禁止切，太大就丟＋ICMP</text:span></text:p>
          </table:table-cell>
          <table:table-cell table:style-name="表格25.A2" office:value-type="string">
            <text:p text:style-name="P15"><text:span text:style-name="T27">MF=1：後面還有分段（最後段=0）</text:span></text:p>
          </table:table-cell>
          <table:table-cell table:style-name="表格25.A2" office:value-type="string">
            <text:p text:style-name="P15"><text:span text:style-name="T5">Offset=起始÷8；MSS=MTU−40=1460</text:span>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8"><text:span text:style-name="T33">✅ <text:s/></text:span><text:span text:style-name="T10">提醒</text:span></text:p>
            <text:p text:style-name="P19"><text:span text:style-name="T28">以上即全書精華。接下來各篇為完整觀念詳解、生活比喻、申論寫法與考試陷阱，務必至少讀過一遍以建立理解，再用本篇反覆速記。</text:span></text:p>
          </table:table-cell>
          <table:covered-table-cell/>
          <table:covered-table-cell/>
          <table:covered-table-cell/>
        </table:table-row>
      </table:table>
      <text:h text:style-name="P1" text:outline-level="1"><text:span text:style-name="T23">第 一 篇　網路基礎架構：OSI / TCP-IP · 協定 · IP/Routing/ICMP · ARP · Traceroute</text:span>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8"><text:span text:style-name="T33">🌐 <text:s/></text:span><text:span text:style-name="T10">本篇重點</text:span></text:p>
            <text:p text:style-name="P19"><text:span text:style-name="T28">本篇先建立整個網路的「分層」骨架，再逐層認識常見協定，最後切入網路層三大工作與兩個必考工具（ARP、Traceroute）。理解每一層的「責任」，比死背名詞更重要。</text:span></text:p>
          </table:table-cell>
        </table:table-row>
      </table:table>
      <text:h text:style-name="P2" text:outline-level="2"><text:span text:style-name="T4">一、用「寄信」理解分層（修正版）</text:span></text:h>
      <text:p text:style-name="P24"><text:span text:style-name="T28">每一層就像寄信流程中各自獨立的環節，各司其職、互不干涉：</text:span>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13"><text:span text:style-name="T22">TCP/IP 層</text:span></text:p>
            </table:table-cell>
            <table:table-cell table:style-name="表格27.A1" office:value-type="string">
              <text:p text:style-name="P13"><text:span text:style-name="T22">郵寄比喻</text:span></text:p>
            </table:table-cell>
            <table:table-cell table:style-name="表格27.A1" office:value-type="string">
              <text:p text:style-name="P13"><text:span text:style-name="T22">實際負責的事</text:span>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15"><text:span text:style-name="T27">🟢 應用層 Application</text:span></text:p>
          </table:table-cell>
          <table:table-cell table:style-name="表格27.A2" office:value-type="string">
            <text:p text:style-name="P15"><text:span text:style-name="T27">決定「寄什麼內容」（信的內容與格式）</text:span></text:p>
          </table:table-cell>
          <table:table-cell table:style-name="表格27.A2" office:value-type="string">
            <text:p text:style-name="P15"><text:span text:style-name="T27">HTTP、DNS、DHCP、SSH …使用者直接操作的服務</text:span></text:p>
          </table:table-cell>
        </table:table-row>
        <table:table-row table:style-name="表格27.1">
          <table:table-cell table:style-name="表格27.A3" office:value-type="string">
            <text:p text:style-name="P15"><text:span text:style-name="T27">🟡 傳輸層 Transport</text:span></text:p>
          </table:table-cell>
          <table:table-cell table:style-name="表格27.A3" office:value-type="string">
            <text:p text:style-name="P15"><text:span text:style-name="T27">切分、編號、掛號確認</text:span></text:p>
          </table:table-cell>
          <table:table-cell table:style-name="表格27.A3" office:value-type="string">
            <text:p text:style-name="P15"><text:span text:style-name="T27">TCP / UDP：切割封包、重傳、流量控制</text:span></text:p>
          </table:table-cell>
        </table:table-row>
        <table:table-row table:style-name="表格27.1">
          <table:table-cell table:style-name="表格27.A2" office:value-type="string">
            <text:p text:style-name="P15"><text:span text:style-name="T27">🔵 網路層 Network</text:span></text:p>
          </table:table-cell>
          <table:table-cell table:style-name="表格27.A2" office:value-type="string">
            <text:p text:style-name="P15"><text:span text:style-name="T27">寫地址＋規劃路線（郵遞區號＋郵局選路）</text:span></text:p>
          </table:table-cell>
          <table:table-cell table:style-name="表格27.A2" office:value-type="string">
            <text:p text:style-name="P15"><text:span text:style-name="T27">IP 路由、ICMP：決定封包走哪條路</text:span></text:p>
          </table:table-cell>
        </table:table-row>
        <table:table-row table:style-name="表格27.1">
          <table:table-cell table:style-name="表格27.A3" office:value-type="string">
            <text:p text:style-name="P15"><text:span text:style-name="T27">🟠 連結層 Link</text:span></text:p>
          </table:table-cell>
          <table:table-cell table:style-name="表格27.A3" office:value-type="string">
            <text:p text:style-name="P15"><text:span text:style-name="T27">當前路段的區域配送</text:span></text:p>
          </table:table-cell>
          <table:table-cell table:style-name="表格27.A3" office:value-type="string">
            <text:p text:style-name="P15"><text:span text:style-name="T27">Ethernet、ARP：同一區域網路內傳輸</text:span>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8"><text:span text:style-name="T33">⚠️ <text:s/></text:span><text:span text:style-name="T39">舊版三大比喻的錯誤</text:span></text:p>
            <text:p text:style-name="P19"><text:span text:style-name="T29">❌ 舊：「寫地址 → 應用層」　</text:span><text:span text:style-name="T28">IP 位址屬於網路層；應用層負責的是「內容與格式」，不是地址。</text:span></text:p>
            <text:p text:style-name="P20"><text:span text:style-name="T29">❌ 舊：「打包 → 傳輸層」　</text:span><text:span text:style-name="T28">傳輸層還負責切割、編號、重傳、流量控制，遠不只「打包」。</text:span></text:p>
            <text:p text:style-name="P20"><text:span text:style-name="T29">❌ 舊：「實際搬運 → 連結層」　</text:span><text:span text:style-name="T28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2" text:outline-level="2"><text:span text:style-name="T4">二、OSI 7 層 vs TCP/IP 4 層（完整對照）</text:span></text:h>
      <text:p text:style-name="P24"><text:span text:style-name="T28">OSI 是理論模型（7 層）；TCP/IP 是實際使用的模型（4 層）。TCP/IP 將 OSI 的 Session 層與 Presentation 層併入 Application 層，並把 Physical 併入 Link。</text:span>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12"><text:span text:style-name="T22">層號</text:span></text:p>
            </table:table-cell>
            <table:table-cell table:style-name="表格28.A1" office:value-type="string">
              <text:p text:style-name="P12"><text:span text:style-name="T22">OSI 層名</text:span></text:p>
            </table:table-cell>
            <table:table-cell table:style-name="表格28.A1" office:value-type="string">
              <text:p text:style-name="P12"><text:span text:style-name="T22">主要功能</text:span></text:p>
            </table:table-cell>
            <table:table-cell table:style-name="表格28.A1" office:value-type="string">
              <text:p text:style-name="P12"><text:span text:style-name="T22">TCP/IP 對應</text:span>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14"><text:span text:style-name="T27">7</text:span></text:p>
          </table:table-cell>
          <table:table-cell table:style-name="表格28.A2" office:value-type="string">
            <text:p text:style-name="P15"><text:span text:style-name="T27">Application 應用層</text:span></text:p>
          </table:table-cell>
          <table:table-cell table:style-name="表格28.A2" office:value-type="string">
            <text:p text:style-name="P15"><text:span text:style-name="T27">使用者直接操作：HTTP、DNS、DHCP</text:span></text:p>
          </table:table-cell>
          <table:table-cell table:style-name="表格28.A2" office:value-type="string">
            <text:p text:style-name="P15"><text:span text:style-name="T27">Application</text:span></text:p>
          </table:table-cell>
        </table:table-row>
        <table:table-row table:style-name="表格28.1">
          <table:table-cell table:style-name="表格28.A3" office:value-type="string">
            <text:p text:style-name="P14"><text:span text:style-name="T27">6</text:span></text:p>
          </table:table-cell>
          <table:table-cell table:style-name="表格28.A3" office:value-type="string">
            <text:p text:style-name="P15"><text:span text:style-name="T27">Presentation 表示層</text:span></text:p>
          </table:table-cell>
          <table:table-cell table:style-name="表格28.A3" office:value-type="string">
            <text:p text:style-name="P15"><text:span text:style-name="T27">資料格式轉換、加解密、壓縮</text:span></text:p>
          </table:table-cell>
          <table:table-cell table:style-name="表格28.A3" office:value-type="string">
            <text:p text:style-name="P15"><text:span text:style-name="T27">↑ 併入 Application</text:span></text:p>
          </table:table-cell>
        </table:table-row>
        <table:table-row table:style-name="表格28.1">
          <table:table-cell table:style-name="表格28.A2" office:value-type="string">
            <text:p text:style-name="P14"><text:span text:style-name="T27">5</text:span></text:p>
          </table:table-cell>
          <table:table-cell table:style-name="表格28.A2" office:value-type="string">
            <text:p text:style-name="P15"><text:span text:style-name="T27">Session 會話層</text:span></text:p>
          </table:table-cell>
          <table:table-cell table:style-name="表格28.A2" office:value-type="string">
            <text:p text:style-name="P15"><text:span text:style-name="T27">連線的建立、維持與終止</text:span></text:p>
          </table:table-cell>
          <table:table-cell table:style-name="表格28.A2" office:value-type="string">
            <text:p text:style-name="P15"><text:span text:style-name="T27">↑ 併入 Application</text:span></text:p>
          </table:table-cell>
        </table:table-row>
        <table:table-row table:style-name="表格28.1">
          <table:table-cell table:style-name="表格28.A3" office:value-type="string">
            <text:p text:style-name="P14"><text:span text:style-name="T27">4</text:span></text:p>
          </table:table-cell>
          <table:table-cell table:style-name="表格28.A3" office:value-type="string">
            <text:p text:style-name="P15"><text:span text:style-name="T27">Transport 傳輸層</text:span></text:p>
          </table:table-cell>
          <table:table-cell table:style-name="表格28.A3" office:value-type="string">
            <text:p text:style-name="P15"><text:span text:style-name="T27">端對端傳輸控制（TCP / UDP）</text:span></text:p>
          </table:table-cell>
          <table:table-cell table:style-name="表格28.A3" office:value-type="string">
            <text:p text:style-name="P15"><text:span text:style-name="T27">Transport</text:span></text:p>
          </table:table-cell>
        </table:table-row>
        <table:table-row table:style-name="表格28.1">
          <table:table-cell table:style-name="表格28.A2" office:value-type="string">
            <text:p text:style-name="P14"><text:span text:style-name="T27">3</text:span></text:p>
          </table:table-cell>
          <table:table-cell table:style-name="表格28.A2" office:value-type="string">
            <text:p text:style-name="P15"><text:span text:style-name="T27">Network 網路層</text:span></text:p>
          </table:table-cell>
          <table:table-cell table:style-name="表格28.A2" office:value-type="string">
            <text:p text:style-name="P15"><text:span text:style-name="T27">IP 路由、ICMP 錯誤回報</text:span></text:p>
          </table:table-cell>
          <table:table-cell table:style-name="表格28.A2" office:value-type="string">
            <text:p text:style-name="P15"><text:span text:style-name="T27">Internet</text:span></text:p>
          </table:table-cell>
        </table:table-row>
        <table:table-row table:style-name="表格28.1">
          <table:table-cell table:style-name="表格28.A3" office:value-type="string">
            <text:p text:style-name="P14"><text:span text:style-name="T27">2</text:span></text:p>
          </table:table-cell>
          <table:table-cell table:style-name="表格28.A3" office:value-type="string">
            <text:p text:style-name="P15"><text:span text:style-name="T27">Data Link 資料鏈結層</text:span></text:p>
          </table:table-cell>
          <table:table-cell table:style-name="表格28.A3" office:value-type="string">
            <text:p text:style-name="P15"><text:span text:style-name="T27">MAC 位址、區域網路傳輸（ARP）</text:span></text:p>
          </table:table-cell>
          <table:table-cell table:style-name="表格28.A3" office:value-type="string">
            <text:p text:style-name="P15"><text:span text:style-name="T27">Link</text:span></text:p>
          </table:table-cell>
        </table:table-row>
        <table:table-row table:style-name="表格28.1">
          <table:table-cell table:style-name="表格28.A2" office:value-type="string">
            <text:p text:style-name="P14"><text:span text:style-name="T27">1</text:span></text:p>
          </table:table-cell>
          <table:table-cell table:style-name="表格28.A2" office:value-type="string">
            <text:p text:style-name="P15"><text:span text:style-name="T27">Physical 實體層</text:span></text:p>
          </table:table-cell>
          <table:table-cell table:style-name="表格28.A2" office:value-type="string">
            <text:p text:style-name="P15"><text:span text:style-name="T27">電訊號、光訊號、無線電波</text:span></text:p>
          </table:table-cell>
          <table:table-cell table:style-name="表格28.A2" office:value-type="string">
            <text:p text:style-name="P15"><text:span text:style-name="T27">↑ 併入 Link</text:span>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8"><text:span text:style-name="T33">⚡ <text:s/></text:span><text:span text:style-name="T35">速記</text:span></text:p>
            <text:p text:style-name="P19"><text:span text:style-name="T28">OSI → 7 層（理論），TCP/IP → 4 層（實際）；差別在於 TCP/IP 少了獨立的 Session 與 Presentation 兩層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4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12"><text:span text:style-name="T22">🟢 Application 應用層</text:span></text:p>
            </table:table-cell>
            <table:table-cell table:style-name="表格29.A1" office:value-type="string">
              <text:p text:style-name="P12"><text:span text:style-name="T22">🟡 Transport 傳輸層</text:span></text:p>
            </table:table-cell>
            <table:table-cell table:style-name="表格29.A1" office:value-type="string">
              <text:p text:style-name="P12"><text:span text:style-name="T22">🔵 Network 網路層</text:span></text:p>
            </table:table-cell>
            <table:table-cell table:style-name="表格29.A1" office:value-type="string">
              <text:p text:style-name="P12"><text:span text:style-name="T22">🟠 Link 連結層</text:span>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15"><text:span text:style-name="T27">HTTP / HTTPS、DNS、DHCP、SSH、MQTT、OSPF*</text:span></text:p>
          </table:table-cell>
          <table:table-cell table:style-name="表格29.A2" office:value-type="string">
            <text:p text:style-name="P15"><text:span text:style-name="T27">TCP（可靠傳輸）、UDP（高速傳輸）</text:span></text:p>
          </table:table-cell>
          <table:table-cell table:style-name="表格29.A2" office:value-type="string">
            <text:p text:style-name="P15"><text:span text:style-name="T27">IP（路由定址）、ICMP（錯誤回報 / ping）</text:span></text:p>
          </table:table-cell>
          <table:table-cell table:style-name="表格29.A2" office:value-type="string">
            <text:p text:style-name="P15"><text:span text:style-name="T27">Ethernet（有線網路）、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9"><text:span text:style-name="T38">OSPF 分層備註：</text:span><text:span text:style-name="T28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pan text:style-name="T4">四、常見協定詳解：DHCP · SSH · MQTT · OSPF</text:span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13"><text:span text:style-name="T25">協定</text:span></text:p>
            </table:table-cell>
            <table:table-cell table:style-name="表格30.A1" office:value-type="string">
              <text:p text:style-name="P13"><text:span text:style-name="T25">層級</text:span></text:p>
            </table:table-cell>
            <table:table-cell table:style-name="表格30.A1" office:value-type="string">
              <text:p text:style-name="P13"><text:span text:style-name="T25">做什麼（白話）</text:span></text:p>
            </table:table-cell>
            <table:table-cell table:style-name="表格30.A1" office:value-type="string">
              <text:p text:style-name="P13"><text:span text:style-name="T25">生活比喻</text:span>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15"><text:span text:style-name="T31">DHCP Dynamic Host Configuration Protocol</text:span></text:p>
          </table:table-cell>
          <table:table-cell table:style-name="表格30.A2" office:value-type="string">
            <text:p text:style-name="P15"><text:span text:style-name="T31">應用層</text:span></text:p>
          </table:table-cell>
          <table:table-cell table:style-name="表格30.A2" office:value-type="string">
            <text:p text:style-name="P15"><text:span text:style-name="T31">連上 WiFi 時不必手動設定 IP，DHCP 伺服器自動分配一個 IP 給你。</text:span></text:p>
          </table:table-cell>
          <table:table-cell table:style-name="表格30.A2" office:value-type="string">
            <text:p text:style-name="P15"><text:span text:style-name="T31">進飯店前台自動安排房號</text:span></text:p>
          </table:table-cell>
        </table:table-row>
        <table:table-row table:style-name="表格30.1">
          <table:table-cell table:style-name="表格30.A3" office:value-type="string">
            <text:p text:style-name="P15"><text:span text:style-name="T31">SSH Secure Shell</text:span></text:p>
          </table:table-cell>
          <table:table-cell table:style-name="表格30.A3" office:value-type="string">
            <text:p text:style-name="P15"><text:span text:style-name="T31">應用層</text:span></text:p>
          </table:table-cell>
          <table:table-cell table:style-name="表格30.A3" office:value-type="string">
            <text:p text:style-name="P15"><text:span text:style-name="T31">透過加密通道遠端操控另一台 Linux／伺服器的終端機。</text:span></text:p>
          </table:table-cell>
          <table:table-cell table:style-name="表格30.A3" office:value-type="string">
            <text:p text:style-name="P15"><text:span text:style-name="T31">加密版的遠端遙控器</text:span></text:p>
          </table:table-cell>
        </table:table-row>
        <table:table-row table:style-name="表格30.1">
          <table:table-cell table:style-name="表格30.A2" office:value-type="string">
            <text:p text:style-name="P15"><text:span text:style-name="T31">MQTT Message Queuing Telemetry Transport</text:span></text:p>
          </table:table-cell>
          <table:table-cell table:style-name="表格30.A2" office:value-type="string">
            <text:p text:style-name="P15"><text:span text:style-name="T31">應用層</text:span></text:p>
          </table:table-cell>
          <table:table-cell table:style-name="表格30.A2" office:value-type="string">
            <text:p text:style-name="P15"><text:span text:style-name="T31">IoT 裝置常用的輕量傳訊協定，採「發布／訂閱」模式，非常省流量。</text:span></text:p>
          </table:table-cell>
          <table:table-cell table:style-name="表格30.A2" office:value-type="string">
            <text:p text:style-name="P15"><text:span text:style-name="T31">溫度感測器發布「30°C」，訂閱者自動收到</text:span></text:p>
          </table:table-cell>
        </table:table-row>
        <table:table-row table:style-name="表格30.1">
          <table:table-cell table:style-name="表格30.A3" office:value-type="string">
            <text:p text:style-name="P15"><text:span text:style-name="T31">OSPF Open Shortest Path First</text:span></text:p>
          </table:table-cell>
          <table:table-cell table:style-name="表格30.A3" office:value-type="string">
            <text:p text:style-name="P15"><text:span text:style-name="T31">視模型而定 ⚠️</text:span></text:p>
          </table:table-cell>
          <table:table-cell table:style-name="表格30.A3" office:value-type="string">
            <text:p text:style-name="P15"><text:span text:style-name="T31">路由器之間使用，自動計算封包走哪條路徑最短、最快。</text:span></text:p>
          </table:table-cell>
          <table:table-cell table:style-name="表格30.A3" office:value-type="string">
            <text:p text:style-name="P15"><text:span text:style-name="T31">Google Maps 幫路由器規劃最佳路線</text:span>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8"><text:span text:style-name="T33">💡 <text:s/></text:span><text:span text:style-name="T35">快速判斷層級的技巧</text:span></text:p>
            <text:p text:style-name="P19"><text:span text:style-name="T36">使用者／應用服務</text:span><text:span text:style-name="T28">（SSH、DHCP、MQTT、HTTP）→ 幾乎都是應用層。</text:span></text:p>
            <text:p text:style-name="P20"><text:span text:style-name="T36">幫路由器決定走哪條路</text:span><text:span text:style-name="T28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pan text:style-name="T4">五、網路層深度解析：IP · Routing · ICMP</text:span></text:h>
      <text:p text:style-name="P24"><text:span text:style-name="T28">網路層（第 3 層）是整個網路的「大腦」，負責三件獨立但相關的事：</text:span>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12"><text:span text:style-name="T22">📍 IP（位址）</text:span></text:p>
            </table:table-cell>
            <table:table-cell table:style-name="表格31.A1" office:value-type="string">
              <text:p text:style-name="P12"><text:span text:style-name="T22">🗺️ Routing（路由）</text:span></text:p>
            </table:table-cell>
            <table:table-cell table:style-name="表格31.A1" office:value-type="string">
              <text:p text:style-name="P12"><text:span text:style-name="T22">🚨 ICMP（錯誤回報）</text:span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15"><text:span text:style-name="T27">決定「目的地在哪」。每台設備都有 IP，就像門牌；IP 負責標記「我要送去哪裡」。</text:span></text:p>
          </table:table-cell>
          <table:table-cell table:style-name="表格31.A2" office:value-type="string">
            <text:p text:style-name="P15"><text:span text:style-name="T27">決定「怎麼走最快」。封包經過很多路由器，每台都問「下一站往哪送？」OSPF 等協定算出最短路徑。</text:span></text:p>
          </table:table-cell>
          <table:table-cell table:style-name="表格31.A2" office:value-type="string">
            <text:p text:style-name="P15"><text:span text:style-name="T27">回報「出了什麼問題」。找不到主機、路不通、TTL 歸零 → 各自回傳對應 ICMP 訊息。</text:span>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8"><text:span text:style-name="T33">🔍 <text:s/></text:span><text:span text:style-name="T10">ping 是什麼？為什麼跟 ICMP 有關？</text:span></text:p>
            <text:p text:style-name="P19"><text:span text:style-name="T12">ping google.com 的運作：</text:span></text:p>
            <text:p text:style-name="P20"><text:span text:style-name="T28">① 你的電腦發出 ICMP Echo Request（「你在嗎？」）</text:span></text:p>
            <text:p text:style-name="P20"><text:span text:style-name="T28">② 目標主機回傳 ICMP Echo Reply（「我在！」）</text:span></text:p>
            <text:p text:style-name="P20"><text:span text:style-name="T28">③ 顯示來回時間（ms），數字越小代表網路越暢通</text:span></text:p>
            <text:p text:style-name="P20"><text:span text:style-name="T38">⚠️ 重點：</text:span><text:span text:style-name="T28">ping 完全使用 ICMP，不走 TCP 也不走 UDP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8"><text:span text:style-name="T33">⚡ <text:s/></text:span><text:span text:style-name="T35">三個概念一次記清楚</text:span></text:p>
            <text:p text:style-name="P19"><text:span text:style-name="T36">📍 IP → </text:span><text:span text:style-name="T28">定位（目的地是誰）　</text:span><text:span text:style-name="T36">🗺️ Routing → </text:span><text:span text:style-name="T28">選路（怎麼走最快）　</text:span><text:span text:style-name="T36">🚨 ICMP → </text:span><text:span text:style-name="T28">回報（出錯了通知你）</text:span></text:p>
          </table:table-cell>
          <table:covered-table-cell/>
          <table:covered-table-cell/>
        </table:table-row>
      </table:table>
      <text:h text:style-name="P2" text:outline-level="2"><text:soft-page-break/><text:span text:style-name="T4">六、TCP vs UDP 差異比較</text:span></text:h>
      <text:p text:style-name="P24"><text:span text:style-name="T28">傳輸層最核心的兩個協定，差異在於「是否保證送達」（更深入的擁塞控制見第五篇）。</text:span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13"><text:span text:style-name="T24">比較項目</text:span></text:p>
            </table:table-cell>
            <table:table-cell table:style-name="表格32.A1" office:value-type="string">
              <text:p text:style-name="P13"><text:span text:style-name="T24">TCP</text:span></text:p>
            </table:table-cell>
            <table:table-cell table:style-name="表格32.A1" office:value-type="string">
              <text:p text:style-name="P13"><text:span text:style-name="T24">UDP</text:span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15"><text:span text:style-name="T30">連線方式</text:span></text:p>
          </table:table-cell>
          <table:table-cell table:style-name="表格32.A2" office:value-type="string">
            <text:p text:style-name="P15"><text:span text:style-name="T30">需要握手（三向交握）</text:span></text:p>
          </table:table-cell>
          <table:table-cell table:style-name="表格32.A2" office:value-type="string">
            <text:p text:style-name="P15"><text:span text:style-name="T30">無連線，直接送出</text:span></text:p>
          </table:table-cell>
        </table:table-row>
        <table:table-row table:style-name="表格32.1">
          <table:table-cell table:style-name="表格32.A3" office:value-type="string">
            <text:p text:style-name="P15"><text:span text:style-name="T30">可靠性</text:span></text:p>
          </table:table-cell>
          <table:table-cell table:style-name="表格32.A3" office:value-type="string">
            <text:p text:style-name="P15"><text:span text:style-name="T30">保證送達，遺失會重傳</text:span></text:p>
          </table:table-cell>
          <table:table-cell table:style-name="表格32.A3" office:value-type="string">
            <text:p text:style-name="P15"><text:span text:style-name="T30">不保證，遺失不補</text:span></text:p>
          </table:table-cell>
        </table:table-row>
        <table:table-row table:style-name="表格32.1">
          <table:table-cell table:style-name="表格32.A2" office:value-type="string">
            <text:p text:style-name="P15"><text:span text:style-name="T30">速度</text:span></text:p>
          </table:table-cell>
          <table:table-cell table:style-name="表格32.A2" office:value-type="string">
            <text:p text:style-name="P15"><text:span text:style-name="T30">較慢（有確認機制）</text:span></text:p>
          </table:table-cell>
          <table:table-cell table:style-name="表格32.A2" office:value-type="string">
            <text:p text:style-name="P15"><text:span text:style-name="T30">較快（無確認機制）</text:span></text:p>
          </table:table-cell>
        </table:table-row>
        <table:table-row table:style-name="表格32.1">
          <table:table-cell table:style-name="表格32.A3" office:value-type="string">
            <text:p text:style-name="P15"><text:span text:style-name="T30">使用情境</text:span></text:p>
          </table:table-cell>
          <table:table-cell table:style-name="表格32.A3" office:value-type="string">
            <text:p text:style-name="P15"><text:span text:style-name="T30">HTTP、Email、FTP</text:span></text:p>
          </table:table-cell>
          <table:table-cell table:style-name="表格32.A3" office:value-type="string">
            <text:p text:style-name="P15"><text:span text:style-name="T30">串流影音、VoIP、DNS</text:span></text:p>
          </table:table-cell>
        </table:table-row>
        <table:table-row table:style-name="表格32.1">
          <table:table-cell table:style-name="表格32.A2" office:value-type="string">
            <text:p text:style-name="P15"><text:span text:style-name="T30">一句話</text:span></text:p>
          </table:table-cell>
          <table:table-cell table:style-name="表格32.A2" office:value-type="string">
            <text:p text:style-name="P15"><text:span text:style-name="T37">「穩定優先」</text:span></text:p>
          </table:table-cell>
          <table:table-cell table:style-name="表格32.A2" office:value-type="string">
            <text:p text:style-name="P15"><text:span text:style-name="T6">「速度優先」</text:span></text:p>
          </table:table-cell>
        </table:table-row>
      </table:table>
      <text:h text:style-name="P2" text:outline-level="2"><text:span text:style-name="T4">七、ARP — 位址解析協定</text:span>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8"><text:span text:style-name="T33">🔗 <text:s/></text:span><text:span text:style-name="T10">ARP 重點</text:span></text:p>
            <text:p text:style-name="P19"><text:span text:style-name="T12">ARP 做什麼？　</text:span><text:span text:style-name="T28">在同一個區域網路（LAN）中，將「IP 位址（邏輯位址）」轉換成「MAC 位址（實體位址）」。</text:span></text:p>
            <text:p text:style-name="P20"><text:span text:style-name="T12">為何屬於 Link 層？　</text:span><text:span text:style-name="T28">ARP 的作用範圍僅限於同一區域網路內，無法跨越路由器，因此歸屬 Link（連結）層。</text:span></text:p>
            <text:p text:style-name="P20"><text:span text:style-name="T12">運作流程：</text:span></text:p>
            <text:p text:style-name="P20"><text:span text:style-name="T28">① 裝置 A 廣播詢問：「誰的 IP 是 192.168.1.5？」</text:span></text:p>
            <text:p text:style-name="P20"><text:span text:style-name="T28">② 裝置 B 回應：「是我！MAC 是 AA:BB:CC:DD:EE:FF」</text:span></text:p>
            <text:p text:style-name="P20"><text:span text:style-name="T28">③ 裝置 A 記錄此對應至 ARP 快取，下次直接使用</text:span></text:p>
          </table:table-cell>
        </table:table-row>
      </table:table>
      <text:p text:style-name="P24"><text:span text:style-name="T17">（ARP 完整流程、ARP Spoofing 與完整上網流程，詳見第四篇。）</text:span></text:p>
      <text:h text:style-name="P2" text:outline-level="2"><text:span text:style-name="T4">八、Traceroute 原理詳解（TTL 機制）</text:span>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9"><text:span text:style-name="T3">目的：</text:span><text:span text:style-name="T28">找出封包從來源到目的地，中間經過哪些路由器（完整路徑偵測）。</text:span></text:p>
            <text:p text:style-name="P20"><text:span text:style-name="T3">TTL（Time To Live）：</text:span><text:span text:style-name="T28">封包的「存活計數器」。每經過一個路由器就減 1；歸零時路由器丟棄封包，並回傳 ICMP Time Exceeded 給發送方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13"><text:span text:style-name="T25">封包次數</text:span></text:p>
          </table:table-cell>
          <table:table-cell table:style-name="表格34.A2" office:value-type="string">
            <text:p text:style-name="P13"><text:span text:style-name="T25">TTL 值</text:span></text:p>
          </table:table-cell>
          <table:table-cell table:style-name="表格34.A2" office:value-type="string">
            <text:p text:style-name="P13"><text:span text:style-name="T25">發生什麼事</text:span></text:p>
          </table:table-cell>
          <table:table-cell table:style-name="表格34.A2" office:value-type="string">
            <text:p text:style-name="P13"><text:span text:style-name="T25">取得資訊</text:span></text:p>
          </table:table-cell>
        </table:table-row>
        <table:table-row table:style-name="表格34.1">
          <table:table-cell table:style-name="表格34.A3" office:value-type="string">
            <text:p text:style-name="P15"><text:span text:style-name="T31">第 1 次</text:span></text:p>
          </table:table-cell>
          <table:table-cell table:style-name="表格34.A3" office:value-type="string">
            <text:p text:style-name="P15"><text:span text:style-name="T31">TTL = 1</text:span></text:p>
          </table:table-cell>
          <table:table-cell table:style-name="表格34.A3" office:value-type="string">
            <text:p text:style-name="P15"><text:span text:style-name="T31">抵達第 1 個 Router → TTL 歸零 → 回傳 ICMP Time Exceeded</text:span></text:p>
          </table:table-cell>
          <table:table-cell table:style-name="表格34.A3" office:value-type="string">
            <text:p text:style-name="P15"><text:span text:style-name="T31">得知第 1 站位置</text:span></text:p>
          </table:table-cell>
        </table:table-row>
        <table:table-row table:style-name="表格34.1">
          <table:table-cell table:style-name="表格34.A4" office:value-type="string">
            <text:p text:style-name="P15"><text:span text:style-name="T31">第 2 次</text:span></text:p>
          </table:table-cell>
          <table:table-cell table:style-name="表格34.A4" office:value-type="string">
            <text:p text:style-name="P15"><text:span text:style-name="T31">TTL = 2</text:span></text:p>
          </table:table-cell>
          <table:table-cell table:style-name="表格34.A4" office:value-type="string">
            <text:p text:style-name="P15"><text:span text:style-name="T31">通過第 1 站 → 抵達第 2 個 Router → TTL 歸零 → 回傳 ICMP</text:span></text:p>
          </table:table-cell>
          <table:table-cell table:style-name="表格34.A4" office:value-type="string">
            <text:p text:style-name="P15"><text:span text:style-name="T31">得知第 2 站位置</text:span></text:p>
          </table:table-cell>
        </table:table-row>
        <table:table-row table:style-name="表格34.1">
          <table:table-cell table:style-name="表格34.A3" office:value-type="string">
            <text:p text:style-name="P15"><text:span text:style-name="T31">第 N 次</text:span></text:p>
          </table:table-cell>
          <table:table-cell table:style-name="表格34.A3" office:value-type="string">
            <text:p text:style-name="P15"><text:span text:style-name="T31">TTL = N</text:span></text:p>
          </table:table-cell>
          <table:table-cell table:style-name="表格34.A3" office:value-type="string">
            <text:p text:style-name="P15"><text:span text:style-name="T31">以此類推，每次多走一站</text:span></text:p>
          </table:table-cell>
          <table:table-cell table:style-name="表格34.A3" office:value-type="string">
            <text:p text:style-name="P15"><text:span text:style-name="T31">逐步還原完整路徑</text:span></text:p>
          </table:table-cell>
        </table:table-row>
        <table:table-row table:style-name="表格34.1">
          <table:table-cell table:style-name="表格34.A4" office:value-type="string">
            <text:p text:style-name="P15"><text:span text:style-name="T31">最後</text:span></text:p>
          </table:table-cell>
          <table:table-cell table:style-name="表格34.A4" office:value-type="string">
            <text:p text:style-name="P15"><text:span text:style-name="T31">TTL = 距離</text:span></text:p>
          </table:table-cell>
          <table:table-cell table:style-name="表格34.A4" office:value-type="string">
            <text:p text:style-name="P15"><text:span text:style-name="T31">封包抵達目的地，回傳正常應答</text:span></text:p>
          </table:table-cell>
          <table:table-cell table:style-name="表格34.A4" office:value-type="string">
            <text:p text:style-name="P15"><text:span text:style-name="T31">路徑偵測完成 ✓</text:span>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8"><text:span text:style-name="T33">⚡ <text:s/></text:span><text:span text:style-name="T35">一句話記憶</text:span></text:p>
            <text:p text:style-name="P19"><text:span text:style-name="T28">Traceroute = TTL 遞增 ＋ ICMP 回報，逐步「炸出」完整網路路徑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pan text:style-name="T4">九、本篇考試必背心法</text:span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8"><text:span text:style-name="T33">🔥 <text:s/></text:span><text:span text:style-name="T49">TCP/IP 四層心法（背這個就夠）</text:span></text:p>
            <text:p text:style-name="P19"><text:span text:style-name="T50">🟢 Application（應用層） → </text:span><text:span text:style-name="T28">給人用（HTTP、DNS、DHCP、SSH、MQTT）</text:span></text:p>
            <text:p text:style-name="P20"><text:soft-page-break/><text:span text:style-name="T50">🟡 Transport（傳輸層） → </text:span><text:span text:style-name="T28">怎麼送（TCP＝穩定 / UDP＝快速）</text:span></text:p>
            <text:p text:style-name="P20"><text:span text:style-name="T50">🔵 Network（網路層） → </text:span><text:span text:style-name="T28">走哪條路（IP、ICMP）</text:span></text:p>
            <text:p text:style-name="P20"><text:span text:style-name="T50">🟠 Link（連結層） → </text:span><text:span text:style-name="T28">同一區網怎麼接（Ethernet、ARP）</text:span></text:p>
          </table:table-cell>
        </table:table-row>
      </table:table>
      <text:h text:style-name="P1" text:outline-level="1"><text:span text:style-name="T23">第 二 篇　IP 位址與封包處理：分類 · CIDR · VLSM · MTU · Fragmentation</text:span>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8"><text:span text:style-name="T33">📐 <text:s/></text:span><text:span text:style-name="T10">本篇重點</text:span></text:p>
            <text:p text:style-name="P19"><text:span text:style-name="T28">本篇分兩大主軸：前半談「IP 位址如何劃分」（分類、CIDR、子網計算、VLSM、CIDR 合併）；後半談「封包如何被切割傳送」（MTU、Fragmentation、IP Header、DF/MF、PMTUD、MSS、Frag DoS）。子網計算是計算題必考，務必動手練。</text:span></text:p>
          </table:table-cell>
        </table:table-row>
      </table:table>
      <text:h text:style-name="P2" text:outline-level="2"><text:span text:style-name="T4">壹、IP 位址基礎</text:span></text:h>
      <text:p text:style-name="P24"><text:span text:style-name="T28">IP 位址（IPv4）是一組 32 個 bit，用來識別網路上每一台設備的「地址」。為了人類方便閱讀，這 32 個 bit 被分成 4 組、每組 8 個 bit（一個 Octet），再轉成十進位、以「點」隔開。</text:span></text:p>
      <table:table table:name="表格37" table:style-name="表格37">
        <table:table-column table:style-name="表格37.A" table:number-columns-repeated="3"/>
        <table:table-column table:style-name="表格37.D"/>
        <table:table-header-rows>
          <table:table-row table:style-name="表格37.1">
            <table:table-cell table:style-name="表格37.A1" office:value-type="string">
              <text:p text:style-name="P12"><text:span text:style-name="T24">Octet 1</text:span></text:p>
            </table:table-cell>
            <table:table-cell table:style-name="表格37.A1" office:value-type="string">
              <text:p text:style-name="P12"><text:span text:style-name="T24">Octet 2</text:span></text:p>
            </table:table-cell>
            <table:table-cell table:style-name="表格37.A1" office:value-type="string">
              <text:p text:style-name="P12"><text:span text:style-name="T24">Octet 3</text:span></text:p>
            </table:table-cell>
            <table:table-cell table:style-name="表格37.A1" office:value-type="string">
              <text:p text:style-name="P12"><text:span text:style-name="T24">Octet 4</text:span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15"><text:span text:style-name="T30">192</text:span></text:p>
          </table:table-cell>
          <table:table-cell table:style-name="表格37.A2" office:value-type="string">
            <text:p text:style-name="P15"><text:span text:style-name="T30">168</text:span></text:p>
          </table:table-cell>
          <table:table-cell table:style-name="表格37.A2" office:value-type="string">
            <text:p text:style-name="P15"><text:span text:style-name="T30">1</text:span></text:p>
          </table:table-cell>
          <table:table-cell table:style-name="表格37.A2" office:value-type="string">
            <text:p text:style-name="P15"><text:span text:style-name="T30">0</text:span></text:p>
          </table:table-cell>
        </table:table-row>
      </table:table>
      <text:p text:style-name="P24"><text:span text:style-name="T20">→ 總共 4 × 8 = 32 個 bit，每組數字範圍 0～255（因為 2⁸ = 256 種組合）。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8"><text:span text:style-name="T33">💡 <text:s/></text:span><text:span text:style-name="T39">為什麼 IP 數量一定是 2 的次方？</text:span></text:p>
            <text:p text:style-name="P19"><text:span text:style-name="T28">每一個 bit 只有 0 或 1 兩種狀態。若有 n 個 bit 可自由變化，可能的組合數 ＝ 2ⁿ。</text:span></text:p>
            <text:p text:style-name="P20"><text:span text:style-name="T28">因此子網路的 IP 總數一定是 2、4、8、16、32、64、128、256… 等 2 的次方，不可能是 100 或 50。這就是計算子網時必須「找最接近的 2ⁿ」的根本原因。</text:span></text:p>
          </table:table-cell>
        </table:table-row>
      </table:table>
      <text:h text:style-name="P2" text:outline-level="2"><text:span text:style-name="T4">貳、IP 分類（A / B / C 類）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13"><text:span text:style-name="T22">類別</text:span></text:p>
            </table:table-cell>
            <table:table-cell table:style-name="表格39.A1" office:value-type="string">
              <text:p text:style-name="P13"><text:span text:style-name="T22">第一組數字範圍</text:span></text:p>
            </table:table-cell>
            <table:table-cell table:style-name="表格39.A1" office:value-type="string">
              <text:p text:style-name="P13"><text:span text:style-name="T22">預設遮罩</text:span></text:p>
            </table:table-cell>
            <table:table-cell table:style-name="表格39.A1" office:value-type="string">
              <text:p text:style-name="P13"><text:span text:style-name="T22">用途</text:span></text:p>
            </table:table-cell>
            <table:table-cell table:style-name="表格39.A1" office:value-type="string">
              <text:p text:style-name="P13"><text:span text:style-name="T22">每網路主機數</text:span>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15"><text:span text:style-name="T27">A 類</text:span></text:p>
          </table:table-cell>
          <table:table-cell table:style-name="表格39.A2" office:value-type="string">
            <text:p text:style-name="P15"><text:span text:style-name="T27">1 ～ 126</text:span></text:p>
          </table:table-cell>
          <table:table-cell table:style-name="表格39.A2" office:value-type="string">
            <text:p text:style-name="P15"><text:span text:style-name="T27">/8</text:span></text:p>
          </table:table-cell>
          <table:table-cell table:style-name="表格39.A2" office:value-type="string">
            <text:p text:style-name="P15"><text:span text:style-name="T27">超大型網路</text:span></text:p>
          </table:table-cell>
          <table:table-cell table:style-name="表格39.A2" office:value-type="string">
            <text:p text:style-name="P15"><text:span text:style-name="T27">約 1,677 萬</text:span></text:p>
          </table:table-cell>
        </table:table-row>
        <table:table-row table:style-name="表格39.1">
          <table:table-cell table:style-name="表格39.A3" office:value-type="string">
            <text:p text:style-name="P15"><text:span text:style-name="T27">B 類</text:span></text:p>
          </table:table-cell>
          <table:table-cell table:style-name="表格39.A3" office:value-type="string">
            <text:p text:style-name="P15"><text:span text:style-name="T27">128 ～ 191</text:span></text:p>
          </table:table-cell>
          <table:table-cell table:style-name="表格39.A3" office:value-type="string">
            <text:p text:style-name="P15"><text:span text:style-name="T27">/16</text:span></text:p>
          </table:table-cell>
          <table:table-cell table:style-name="表格39.A3" office:value-type="string">
            <text:p text:style-name="P15"><text:span text:style-name="T27">中型網路</text:span></text:p>
          </table:table-cell>
          <table:table-cell table:style-name="表格39.A3" office:value-type="string">
            <text:p text:style-name="P15"><text:span text:style-name="T27">約 6.5 萬</text:span></text:p>
          </table:table-cell>
        </table:table-row>
        <table:table-row table:style-name="表格39.1">
          <table:table-cell table:style-name="表格39.A2" office:value-type="string">
            <text:p text:style-name="P15"><text:span text:style-name="T27">C 類</text:span></text:p>
          </table:table-cell>
          <table:table-cell table:style-name="表格39.A2" office:value-type="string">
            <text:p text:style-name="P15"><text:span text:style-name="T27">192 ～ 223</text:span></text:p>
          </table:table-cell>
          <table:table-cell table:style-name="表格39.A2" office:value-type="string">
            <text:p text:style-name="P15"><text:span text:style-name="T27">/24</text:span></text:p>
          </table:table-cell>
          <table:table-cell table:style-name="表格39.A2" office:value-type="string">
            <text:p text:style-name="P15"><text:span text:style-name="T27">小型網路</text:span></text:p>
          </table:table-cell>
          <table:table-cell table:style-name="表格39.A2" office:value-type="string">
            <text:p text:style-name="P15"><text:span text:style-name="T27">254</text:span>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9"><text:span text:style-name="T38">127.x.x.x 為何不在 A 類？　</text:span><text:span text:style-name="T28">127.0.0.1 是回送位址（Loopback），保留給本機自我測試；ping 127.0.0.1 可測本機協定是否正常，故 A 類跳過 127，只到 126。</text:span></text:p>
            <text:p text:style-name="P20"><text:span text:style-name="T38">其他保留位址：</text:span><text:span text:style-name="T28">0.x.x.x＝代表「這個網路本身」；224～239＝D 類（群播 Multicast）；240～255＝E 類（實驗用）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2" text:outline-level="2"><text:span text:style-name="T4">參、CIDR 表示法（斜線 /幾）</text:span></text:h>
      <text:p text:style-name="P24"><text:span text:style-name="T28">CIDR（無類別網域間路由）以「IP + / + 數字」精確表示網路大小，例如 192.168.1.0/24。/ 後面的數字 ＝ 前幾個 bit 是「網路部分」（固定不變），剩下的才是「主機部分」（可變）。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13"><text:span text:style-name="T22">表示法</text:span></text:p>
            </table:table-cell>
            <table:table-cell table:style-name="表格40.A1" office:value-type="string">
              <text:p text:style-name="P13"><text:span text:style-name="T22">網路 bit</text:span></text:p>
            </table:table-cell>
            <table:table-cell table:style-name="表格40.A1" office:value-type="string">
              <text:p text:style-name="P13"><text:span text:style-name="T22">主機 bit</text:span></text:p>
            </table:table-cell>
            <table:table-cell table:style-name="表格40.A1" office:value-type="string">
              <text:p text:style-name="P13"><text:span text:style-name="T22">IP 總數</text:span></text:p>
            </table:table-cell>
            <table:table-cell table:style-name="表格40.A1" office:value-type="string">
              <text:p text:style-name="P13"><text:span text:style-name="T22">對應哪段固定</text:span>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15"><text:span text:style-name="T27">/8</text:span></text:p>
          </table:table-cell>
          <table:table-cell table:style-name="表格40.A2" office:value-type="string">
            <text:p text:style-name="P15"><text:span text:style-name="T27">8</text:span></text:p>
          </table:table-cell>
          <table:table-cell table:style-name="表格40.A2" office:value-type="string">
            <text:p text:style-name="P15"><text:span text:style-name="T27">24</text:span></text:p>
          </table:table-cell>
          <table:table-cell table:style-name="表格40.A2" office:value-type="string">
            <text:p text:style-name="P15"><text:span text:style-name="T27">16,777,216</text:span></text:p>
          </table:table-cell>
          <table:table-cell table:style-name="表格40.A2" office:value-type="string">
            <text:p text:style-name="P15"><text:span text:style-name="T27">第 1 組（A 類）</text:span></text:p>
          </table:table-cell>
        </table:table-row>
        <table:table-row table:style-name="表格40.1">
          <table:table-cell table:style-name="表格40.A3" office:value-type="string">
            <text:p text:style-name="P15"><text:span text:style-name="T27">/16</text:span></text:p>
          </table:table-cell>
          <table:table-cell table:style-name="表格40.A3" office:value-type="string">
            <text:p text:style-name="P15"><text:span text:style-name="T27">16</text:span></text:p>
          </table:table-cell>
          <table:table-cell table:style-name="表格40.A3" office:value-type="string">
            <text:p text:style-name="P15"><text:span text:style-name="T27">16</text:span></text:p>
          </table:table-cell>
          <table:table-cell table:style-name="表格40.A3" office:value-type="string">
            <text:p text:style-name="P15"><text:span text:style-name="T27">65,536</text:span></text:p>
          </table:table-cell>
          <table:table-cell table:style-name="表格40.A3" office:value-type="string">
            <text:p text:style-name="P15"><text:span text:style-name="T27">第 1-2 組（B 類）</text:span></text:p>
          </table:table-cell>
        </table:table-row>
        <table:table-row table:style-name="表格40.1">
          <table:table-cell table:style-name="表格40.A2" office:value-type="string">
            <text:p text:style-name="P15"><text:span text:style-name="T27">/24</text:span></text:p>
          </table:table-cell>
          <table:table-cell table:style-name="表格40.A2" office:value-type="string">
            <text:p text:style-name="P15"><text:span text:style-name="T27">24</text:span></text:p>
          </table:table-cell>
          <table:table-cell table:style-name="表格40.A2" office:value-type="string">
            <text:p text:style-name="P15"><text:span text:style-name="T27">8</text:span></text:p>
          </table:table-cell>
          <table:table-cell table:style-name="表格40.A2" office:value-type="string">
            <text:p text:style-name="P15"><text:span text:style-name="T27">256</text:span></text:p>
          </table:table-cell>
          <table:table-cell table:style-name="表格40.A2" office:value-type="string">
            <text:p text:style-name="P15"><text:span text:style-name="T27">第 1-3 組（C 類）</text:span></text:p>
          </table:table-cell>
        </table:table-row>
        <table:table-row table:style-name="表格40.1">
          <table:table-cell table:style-name="表格40.A3" office:value-type="string">
            <text:p text:style-name="P15"><text:span text:style-name="T27">/25</text:span></text:p>
          </table:table-cell>
          <table:table-cell table:style-name="表格40.A3" office:value-type="string">
            <text:p text:style-name="P15"><text:span text:style-name="T27">25</text:span></text:p>
          </table:table-cell>
          <table:table-cell table:style-name="表格40.A3" office:value-type="string">
            <text:p text:style-name="P15"><text:span text:style-name="T27">7</text:span></text:p>
          </table:table-cell>
          <table:table-cell table:style-name="表格40.A3" office:value-type="string">
            <text:p text:style-name="P15"><text:span text:style-name="T27">128</text:span></text:p>
          </table:table-cell>
          <table:table-cell table:style-name="表格40.A3" office:value-type="string">
            <text:p text:style-name="P15"><text:span text:style-name="T27">第 1-3 組 + 第 4 組前 1 bit</text:span></text:p>
          </table:table-cell>
        </table:table-row>
        <text:soft-page-break/>
        <table:table-row table:style-name="表格40.1">
          <table:table-cell table:style-name="表格40.A2" office:value-type="string">
            <text:p text:style-name="P15"><text:span text:style-name="T27">/26</text:span></text:p>
          </table:table-cell>
          <table:table-cell table:style-name="表格40.A2" office:value-type="string">
            <text:p text:style-name="P15"><text:span text:style-name="T27">26</text:span></text:p>
          </table:table-cell>
          <table:table-cell table:style-name="表格40.A2" office:value-type="string">
            <text:p text:style-name="P15"><text:span text:style-name="T27">6</text:span></text:p>
          </table:table-cell>
          <table:table-cell table:style-name="表格40.A2" office:value-type="string">
            <text:p text:style-name="P15"><text:span text:style-name="T27">64</text:span></text:p>
          </table:table-cell>
          <table:table-cell table:style-name="表格40.A2" office:value-type="string">
            <text:p text:style-name="P15"><text:span text:style-name="T27">第 1-3 組 + 第 4 組前 2 bit</text:span></text:p>
          </table:table-cell>
        </table:table-row>
        <table:table-row table:style-name="表格40.1">
          <table:table-cell table:style-name="表格40.A3" office:value-type="string">
            <text:p text:style-name="P15"><text:span text:style-name="T27">/27</text:span></text:p>
          </table:table-cell>
          <table:table-cell table:style-name="表格40.A3" office:value-type="string">
            <text:p text:style-name="P15"><text:span text:style-name="T27">27</text:span></text:p>
          </table:table-cell>
          <table:table-cell table:style-name="表格40.A3" office:value-type="string">
            <text:p text:style-name="P15"><text:span text:style-name="T27">5</text:span></text:p>
          </table:table-cell>
          <table:table-cell table:style-name="表格40.A3" office:value-type="string">
            <text:p text:style-name="P15"><text:span text:style-name="T27">32</text:span></text:p>
          </table:table-cell>
          <table:table-cell table:style-name="表格40.A3" office:value-type="string">
            <text:p text:style-name="P15"><text:span text:style-name="T27">第 1-3 組 + 第 4 組前 3 bit</text:span></text:p>
          </table:table-cell>
        </table:table-row>
        <table:table-row table:style-name="表格40.1">
          <table:table-cell table:style-name="表格40.A2" office:value-type="string">
            <text:p text:style-name="P15"><text:span text:style-name="T27">/28</text:span></text:p>
          </table:table-cell>
          <table:table-cell table:style-name="表格40.A2" office:value-type="string">
            <text:p text:style-name="P15"><text:span text:style-name="T27">28</text:span></text:p>
          </table:table-cell>
          <table:table-cell table:style-name="表格40.A2" office:value-type="string">
            <text:p text:style-name="P15"><text:span text:style-name="T27">4</text:span></text:p>
          </table:table-cell>
          <table:table-cell table:style-name="表格40.A2" office:value-type="string">
            <text:p text:style-name="P15"><text:span text:style-name="T27">16</text:span></text:p>
          </table:table-cell>
          <table:table-cell table:style-name="表格40.A2" office:value-type="string">
            <text:p text:style-name="P15"><text:span text:style-name="T27">第 1-3 組 + 第 4 組前 4 bit</text:span>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8"><text:span text:style-name="T33">▸ <text:s/></text:span><text:span text:style-name="T10">用 bit 切割理解 /26</text:span></text:p>
            <text:p text:style-name="P19"><text:span text:style-name="T28">以 192.168.1.0/26 為例：</text:span></text:p>
            <text:p text:style-name="P20"><text:span text:style-name="T12">11000000 . 10101000 . 00000001 . 00</text:span><text:span text:style-name="T3">|000000</text:span></text:p>
            <text:p text:style-name="P20"><text:span text:style-name="T28">└── 前 26 bit（固定＝網路）──┘ └ 後 6 bit（可變＝主機）┘</text:span></text:p>
            <text:p text:style-name="P20"><text:span text:style-name="T28">→ 主機 bit 有 6 個 → 2⁶ = 64 個 IP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2" text:outline-level="2"><text:span text:style-name="T4">肆、為什麼可用主機數要「−2」？</text:span>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13"><text:span text:style-name="T22">名稱</text:span></text:p>
            </table:table-cell>
            <table:table-cell table:style-name="表格41.A1" office:value-type="string">
              <text:p text:style-name="P13"><text:span text:style-name="T22">位置</text:span></text:p>
            </table:table-cell>
            <table:table-cell table:style-name="表格41.A1" office:value-type="string">
              <text:p text:style-name="P13"><text:span text:style-name="T22">用途</text:span>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15"><text:span text:style-name="T27">網路位址 Network Address</text:span></text:p>
          </table:table-cell>
          <table:table-cell table:style-name="表格41.A2" office:value-type="string">
            <text:p text:style-name="P15"><text:span text:style-name="T27">第一個 IP（最小）</text:span></text:p>
          </table:table-cell>
          <table:table-cell table:style-name="表格41.A2" office:value-type="string">
            <text:p text:style-name="P15"><text:span text:style-name="T27">代表這整個子網路本身，不能分配給設備</text:span></text:p>
          </table:table-cell>
        </table:table-row>
        <table:table-row table:style-name="表格41.1">
          <table:table-cell table:style-name="表格41.A3" office:value-type="string">
            <text:p text:style-name="P15"><text:span text:style-name="T27">廣播位址 Broadcast Address</text:span></text:p>
          </table:table-cell>
          <table:table-cell table:style-name="表格41.A3" office:value-type="string">
            <text:p text:style-name="P15"><text:span text:style-name="T27">最後一個 IP（最大）</text:span></text:p>
          </table:table-cell>
          <table:table-cell table:style-name="表格41.A3" office:value-type="string">
            <text:p text:style-name="P15"><text:span text:style-name="T27">送到此位址＝網路內所有設備都收到，不能分配給單一設備</text:span>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19"><text:span text:style-name="T50">可用主機數 ＝ IP 總數 − 2</text:span></text:p>
            <text:p text:style-name="P20"><text:span text:style-name="T28">【/24 示範】192.168.1.0＝網路位址（不能用）… 192.168.1.255＝廣播位址（不能用）→ 共 256 個，可用 254 個。</text:span></text:p>
            <text:p text:style-name="P20"><text:span text:style-name="T28">【/26 示範·最常考】192.168.1.0＝網路位址 … 192.168.1.63＝廣播位址 → 共 64 個（2⁶），可用 62 個。</text:span>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9"><text:span text:style-name="T38">唯一例外 /31（點對點，RFC 3021）：</text:span><text:span text:style-name="T28">只有 2 個 IP，兩個都可用作主機，沒有網路位址和廣播位址。考試若未特別提到，預設仍要 −2。</text:span></text:p>
          </table:table-cell>
          <table:covered-table-cell/>
          <table:covered-table-cell/>
        </table:table-row>
      </table:table>
      <text:h text:style-name="P2" text:outline-level="2"><text:span text:style-name="T4">伍、VLSM（可變長度子網路遮罩）</text:span></text:h>
      <text:p text:style-name="P24"><text:span text:style-name="T28">VLSM 的做法：依各部門「實際需求」分配剛剛好大小的子網路，不多給、不浪費。例如 A 部門 100 台、B 部門 50 台、C 部門 10 台，若全用 /24 會浪費大量 IP。</text:span>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8"><text:span text:style-name="T33">📋 <text:s/></text:span><text:span text:style-name="T35">VLSM 標準流程（三步驟）</text:span></text:p>
            <text:p text:style-name="P19"><text:span text:style-name="T36">① 將需求由大到小排序</text:span></text:p>
            <text:p text:style-name="P20"><text:span text:style-name="T36">② 計算每個需求所需前綴：</text:span><text:span text:style-name="T28">需求 + 2 → 找最小 2ⁿ → 前綴 = 32 − n</text:span></text:p>
            <text:p text:style-name="P20"><text:span text:style-name="T36">③ 依序從網路位址起點往後切割</text:span></text:p>
          </table:table-cell>
        </table:table-row>
        <table:table-row table:style-name="表格42.1">
          <table:table-cell table:style-name="表格42.A2" office:value-type="string">
            <text:p text:style-name="P19"><text:span text:style-name="T38">為什麼要「由大到小」？　</text:span><text:span text:style-name="T28">因為「對齊（Alignment）」：子網路的起始位址必須是其大小的整數倍。大小 128 的子網只能從 0、128… 開始；大小 64 的只能從 0、64、128… 開始。</text:span></text:p>
            <text:p text:style-name="P20"><text:span text:style-name="T38">反面示範：</text:span><text:span text:style-name="T28">若先切小的 C（/28，0～15），再切大的 A（/25，128 個），最近可用對齊位址是 128 → 中間 16～127 共 112 個 IP 全浪費！正解：先切大的，大的天然對齊，小的再從後面切。</text:span></text:p>
          </table:table-cell>
        </table:table-row>
      </table:table>
      <text:h text:style-name="P3" text:outline-level="3"><text:span text:style-name="T34">▍</text:span><text:span text:style-name="T35"> 前綴計算公式詳解（以需要 100 台主機為例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9"><text:span text:style-name="T28">① 加 2（預留網路 + 廣播）：100 + 2 = 102</text:span></text:p>
            <text:p text:style-name="P20"><text:span text:style-name="T28">② 找「大於等於 102」的最小 2ⁿ：2⁶ = 64（太小）、2⁷ = 128（夠）→ n = 7</text:span></text:p>
            <text:p text:style-name="P20"><text:span text:style-name="T28">③ 前綴 = 32 − n = 32 − 7 = 25 → 使用 /25（驗證：2⁷ = 128，可用 126 ≥ 100 ✔）</text:span></text:p>
            <text:p text:style-name="P20"><text:span text:style-name="T3">公式一句話：需求 +2 → 找最小 2ⁿ → /(32−n)</text:span></text:p>
          </table:table-cell>
        </table:table-row>
      </table:table>
      <text:h text:style-name="P3" text:outline-level="3"><text:soft-page-break/><text:span text:style-name="T34">▍</text:span><text:span text:style-name="T35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13"><text:span text:style-name="T25">部門</text:span></text:p>
            </table:table-cell>
            <table:table-cell table:style-name="表格44.A1" office:value-type="string">
              <text:p text:style-name="P13"><text:span text:style-name="T25">需求</text:span></text:p>
            </table:table-cell>
            <table:table-cell table:style-name="表格44.A1" office:value-type="string">
              <text:p text:style-name="P13"><text:span text:style-name="T25">+2</text:span></text:p>
            </table:table-cell>
            <table:table-cell table:style-name="表格44.A1" office:value-type="string">
              <text:p text:style-name="P13"><text:span text:style-name="T25">2ⁿ</text:span></text:p>
            </table:table-cell>
            <table:table-cell table:style-name="表格44.A1" office:value-type="string">
              <text:p text:style-name="P13"><text:span text:style-name="T25">前綴</text:span></text:p>
            </table:table-cell>
            <table:table-cell table:style-name="表格44.A1" office:value-type="string">
              <text:p text:style-name="P13"><text:span text:style-name="T25">切割結果（範圍）</text:span></text:p>
            </table:table-cell>
            <table:table-cell table:style-name="表格44.A1" office:value-type="string">
              <text:p text:style-name="P13"><text:span text:style-name="T25">可用 / 需求</text:span>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15"><text:span text:style-name="T31">A</text:span></text:p>
          </table:table-cell>
          <table:table-cell table:style-name="表格44.A2" office:value-type="string">
            <text:p text:style-name="P15"><text:span text:style-name="T31">100</text:span></text:p>
          </table:table-cell>
          <table:table-cell table:style-name="表格44.A2" office:value-type="string">
            <text:p text:style-name="P15"><text:span text:style-name="T31">102</text:span></text:p>
          </table:table-cell>
          <table:table-cell table:style-name="表格44.A2" office:value-type="string">
            <text:p text:style-name="P15"><text:span text:style-name="T31">128（2⁷）</text:span></text:p>
          </table:table-cell>
          <table:table-cell table:style-name="表格44.A2" office:value-type="string">
            <text:p text:style-name="P15"><text:span text:style-name="T31">/25</text:span></text:p>
          </table:table-cell>
          <table:table-cell table:style-name="表格44.A2" office:value-type="string">
            <text:p text:style-name="P15"><text:span text:style-name="T31">192.168.1.0/25（0～127）</text:span></text:p>
          </table:table-cell>
          <table:table-cell table:style-name="表格44.A2" office:value-type="string">
            <text:p text:style-name="P15"><text:span text:style-name="T31">126 ≥ 100 ✔</text:span></text:p>
          </table:table-cell>
        </table:table-row>
        <table:table-row table:style-name="表格44.1">
          <table:table-cell table:style-name="表格44.A3" office:value-type="string">
            <text:p text:style-name="P15"><text:span text:style-name="T31">B</text:span></text:p>
          </table:table-cell>
          <table:table-cell table:style-name="表格44.A3" office:value-type="string">
            <text:p text:style-name="P15"><text:span text:style-name="T31">50</text:span></text:p>
          </table:table-cell>
          <table:table-cell table:style-name="表格44.A3" office:value-type="string">
            <text:p text:style-name="P15"><text:span text:style-name="T31">52</text:span></text:p>
          </table:table-cell>
          <table:table-cell table:style-name="表格44.A3" office:value-type="string">
            <text:p text:style-name="P15"><text:span text:style-name="T31">64（2⁶）</text:span></text:p>
          </table:table-cell>
          <table:table-cell table:style-name="表格44.A3" office:value-type="string">
            <text:p text:style-name="P15"><text:span text:style-name="T31">/26</text:span></text:p>
          </table:table-cell>
          <table:table-cell table:style-name="表格44.A3" office:value-type="string">
            <text:p text:style-name="P15"><text:span text:style-name="T31">192.168.1.128/26（128～191）</text:span></text:p>
          </table:table-cell>
          <table:table-cell table:style-name="表格44.A3" office:value-type="string">
            <text:p text:style-name="P15"><text:span text:style-name="T31">62 ≥ 50 ✔</text:span></text:p>
          </table:table-cell>
        </table:table-row>
        <table:table-row table:style-name="表格44.1">
          <table:table-cell table:style-name="表格44.A2" office:value-type="string">
            <text:p text:style-name="P15"><text:span text:style-name="T31">C</text:span></text:p>
          </table:table-cell>
          <table:table-cell table:style-name="表格44.A2" office:value-type="string">
            <text:p text:style-name="P15"><text:span text:style-name="T31">10</text:span></text:p>
          </table:table-cell>
          <table:table-cell table:style-name="表格44.A2" office:value-type="string">
            <text:p text:style-name="P15"><text:span text:style-name="T31">12</text:span></text:p>
          </table:table-cell>
          <table:table-cell table:style-name="表格44.A2" office:value-type="string">
            <text:p text:style-name="P15"><text:span text:style-name="T31">16（2⁴）</text:span></text:p>
          </table:table-cell>
          <table:table-cell table:style-name="表格44.A2" office:value-type="string">
            <text:p text:style-name="P15"><text:span text:style-name="T31">/28</text:span></text:p>
          </table:table-cell>
          <table:table-cell table:style-name="表格44.A2" office:value-type="string">
            <text:p text:style-name="P15"><text:span text:style-name="T31">192.168.1.192/28（192～207）</text:span></text:p>
          </table:table-cell>
          <table:table-cell table:style-name="表格44.A2" office:value-type="string">
            <text:p text:style-name="P15"><text:span text:style-name="T31">14 ≥ 10 ✔</text:span></text:p>
          </table:table-cell>
        </table:table-row>
      </table:table>
      <text:p text:style-name="P24"><text:span text:style-name="T20">剩餘 192.168.1.208 ～ .255（48 個 IP）為未使用空間。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8"><text:span text:style-name="T33">💡 <text:s/></text:span><text:span text:style-name="T49">考試技巧</text:span></text:p>
            <text:p text:style-name="P19"><text:span text:style-name="T28">快速判斷一個 IP 屬於哪個 /26 子網（每段 64 個，起點 0、64、128、192）：看最後一個 Octet 落在哪個區間 →</text:span></text:p>
            <text:p text:style-name="P20"><text:span text:style-name="T28">0～63 → x.0/26　｜　64～127 → x.64/26　｜　128～191 → x.128/26　｜　192～255 → x.192/26</text:span></text:p>
          </table:table-cell>
        </table:table-row>
      </table:table>
      <text:h text:style-name="P2" text:outline-level="2"><text:span text:style-name="T4">陸、CIDR（路由聚合 / 超網合併）</text:span></text:h>
      <text:p text:style-name="P24"><text:span text:style-name="T28">CIDR 的合併功能是 VLSM 的「反向操作」：VLSM 把大網路切小；CIDR 合併把小網路合成一個大網路表示，讓路由表更精簡（一條記錄代表很多小網路）。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8"><text:span text:style-name="T33">🔑 <text:s/></text:span><text:span text:style-name="T35">合併三條件（缺一不可）</text:span></text:p>
            <text:p text:style-name="P19"><text:span text:style-name="T36">① 連續（Contiguous）：</text:span><text:span text:style-name="T28">IP 範圍必須緊鄰，中間不能有空缺。</text:span></text:p>
            <text:p text:style-name="P20"><text:span text:style-name="T36">② 數量是 2ⁿ：</text:span><text:span text:style-name="T28">2、4、8…。</text:span></text:p>
            <text:p text:style-name="P20"><text:span text:style-name="T36">③ 起始位址對齊：</text:span><text:span text:style-name="T28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8"><text:span text:style-name="T33">▸ <text:s/></text:span><text:span text:style-name="T10">合併範例與反例</text:span></text:p>
            <text:p text:style-name="P19"><text:span text:style-name="T29">範例：2 個 /25 → 1 個 /24　</text:span><text:span text:style-name="T28">192.168.1.0/25 ＋ 192.168.1.128/25 → ① 緊鄰✔ ② 2 個（2¹）✔ ③ 起點 .0，0÷256=0✔ → 合併為 192.168.1.0/24。</text:span></text:p>
            <text:p text:style-name="P20"><text:span text:style-name="T29">範例：4 個 /24 → 1 個 /22　</text:span><text:span text:style-name="T28">192.168.0/1/2/3.0/24 → 連續✔、4 個（2²）✔、對齊✔ → 合併為 192.168.0.0/22。</text:span></text:p>
            <text:p text:style-name="P20"><text:span text:style-name="T43">反例（無法合併）：</text:span><text:span text:style-name="T28">192.168.1.0/24 ＋ 192.168.2.0/24 → 雖數量為 2，但起點 .1 不對齊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9"><text:span text:style-name="T50">合併後前綴公式：</text:span><text:span text:style-name="T28">合併 2ⁿ 個子網 → 前綴減 n（每合併一倍，/ 的數字減 1）。</text:span></text:p>
            <text:p text:style-name="P20"><text:span text:style-name="T28">2 個 /26 → /25；4 個 /26 → /24；2 個 /24 → /23。</text:span></text:p>
          </table:table-cell>
        </table:table-row>
      </table:table>
      <text:h text:style-name="P2" text:outline-level="2"><text:span text:style-name="T4">柒、子網路三大概念與解題流程</text:span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13"><text:span text:style-name="T22">概念</text:span></text:p>
            </table:table-cell>
            <table:table-cell table:style-name="表格47.A1" office:value-type="string">
              <text:p text:style-name="P13"><text:span text:style-name="T22">關鍵字</text:span></text:p>
            </table:table-cell>
            <table:table-cell table:style-name="表格47.A1" office:value-type="string">
              <text:p text:style-name="P13"><text:span text:style-name="T22">核心規則</text:span></text:p>
            </table:table-cell>
            <table:table-cell table:style-name="表格47.A1" office:value-type="string">
              <text:p text:style-name="P13"><text:span text:style-name="T22">比喻</text:span>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15"><text:span text:style-name="T27">IP 分類</text:span></text:p>
          </table:table-cell>
          <table:table-cell table:style-name="表格47.A2" office:value-type="string">
            <text:p text:style-name="P15"><text:span text:style-name="T27">A/B/C 類</text:span></text:p>
          </table:table-cell>
          <table:table-cell table:style-name="表格47.A2" office:value-type="string">
            <text:p text:style-name="P15"><text:span text:style-name="T27">看第一組數字判斷類別</text:span></text:p>
          </table:table-cell>
          <table:table-cell table:style-name="表格47.A2" office:value-type="string">
            <text:p text:style-name="P15"><text:span text:style-name="T27">土地大小分類</text:span></text:p>
          </table:table-cell>
        </table:table-row>
        <table:table-row table:style-name="表格47.1">
          <table:table-cell table:style-name="表格47.A3" office:value-type="string">
            <text:p text:style-name="P15"><text:span text:style-name="T27">VLSM</text:span></text:p>
          </table:table-cell>
          <table:table-cell table:style-name="表格47.A3" office:value-type="string">
            <text:p text:style-name="P15"><text:span text:style-name="T27">切子網路</text:span></text:p>
          </table:table-cell>
          <table:table-cell table:style-name="表格47.A3" office:value-type="string">
            <text:p text:style-name="P15"><text:span text:style-name="T27">由大到小；需求+2→2ⁿ→/(32−n)</text:span></text:p>
          </table:table-cell>
          <table:table-cell table:style-name="表格47.A3" office:value-type="string">
            <text:p text:style-name="P15"><text:span text:style-name="T27">把大地切成不同大小的小塊</text:span></text:p>
          </table:table-cell>
        </table:table-row>
        <table:table-row table:style-name="表格47.1">
          <table:table-cell table:style-name="表格47.A2" office:value-type="string">
            <text:p text:style-name="P15"><text:span text:style-name="T27">CIDR 合併</text:span></text:p>
          </table:table-cell>
          <table:table-cell table:style-name="表格47.A2" office:value-type="string">
            <text:p text:style-name="P15"><text:span text:style-name="T27">聚合路由</text:span></text:p>
          </table:table-cell>
          <table:table-cell table:style-name="表格47.A2" office:value-type="string">
            <text:p text:style-name="P15"><text:span text:style-name="T27">連續 + 數量 2ⁿ + 對齊；前綴減 n</text:span></text:p>
          </table:table-cell>
          <table:table-cell table:style-name="表格47.A2" office:value-type="string">
            <text:p text:style-name="P15"><text:span text:style-name="T27">把相鄰小地合成大地</text:span>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8"><text:span text:style-name="T33">🎯 <text:s/></text:span><text:span text:style-name="T45">考試標準解題流程</text:span></text:p>
            <text:p text:style-name="P19"><text:span text:style-name="T46">遇到 VLSM 題：</text:span><text:span text:style-name="T28">確認起始網路 → 需求由大到小 → 各需求 +2 找 2ⁿ 算前綴 → 大的先切依序往後 → 驗證網路位址/廣播位址/可用範圍。</text:span></text:p>
            <text:p text:style-name="P20"><text:span text:style-name="T46">遇到 CIDR 合併題：</text:span><text:span text:style-name="T28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4">捌、MTU（最大傳輸單位）</text:span></text:h>
      <text:p text:style-name="P24"><text:span text:style-name="T28">MTU ＝ Maximum Transmission Unit，一條網路「一次最多能傳送的封包大小」。</text:span>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13"><text:span text:style-name="T22">網路類型</text:span></text:p>
            </table:table-cell>
            <table:table-cell table:style-name="表格48.A1" office:value-type="string">
              <text:p text:style-name="P13"><text:span text:style-name="T22">MTU 值</text:span></text:p>
            </table:table-cell>
            <table:table-cell table:style-name="表格48.A1" office:value-type="string">
              <text:p text:style-name="P13"><text:span text:style-name="T22">說明</text:span>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15"><text:span text:style-name="T27">Ethernet（乙太網）</text:span></text:p>
          </table:table-cell>
          <table:table-cell table:style-name="表格48.A2" office:value-type="string">
            <text:p text:style-name="P15"><text:span text:style-name="T27">1500 bytes</text:span></text:p>
          </table:table-cell>
          <table:table-cell table:style-name="表格48.A2" office:value-type="string">
            <text:p text:style-name="P15"><text:span text:style-name="T27">最常見，99% 環境</text:span></text:p>
          </table:table-cell>
        </table:table-row>
        <table:table-row table:style-name="表格48.1">
          <table:table-cell table:style-name="表格48.A3" office:value-type="string">
            <text:p text:style-name="P15"><text:span text:style-name="T27">Wi-Fi (802.11)</text:span></text:p>
          </table:table-cell>
          <table:table-cell table:style-name="表格48.A3" office:value-type="string">
            <text:p text:style-name="P15"><text:span text:style-name="T27">2304 bytes</text:span></text:p>
          </table:table-cell>
          <table:table-cell table:style-name="表格48.A3" office:value-type="string">
            <text:p text:style-name="P15"><text:span text:style-name="T27">無線區域網路</text:span></text:p>
          </table:table-cell>
        </table:table-row>
        <table:table-row table:style-name="表格48.1">
          <table:table-cell table:style-name="表格48.A2" office:value-type="string">
            <text:p text:style-name="P15"><text:span text:style-name="T27">PPPoE（ADSL）</text:span></text:p>
          </table:table-cell>
          <table:table-cell table:style-name="表格48.A2" office:value-type="string">
            <text:p text:style-name="P15"><text:span text:style-name="T27">1492 bytes</text:span></text:p>
          </table:table-cell>
          <table:table-cell table:style-name="表格48.A2" office:value-type="string">
            <text:p text:style-name="P15"><text:span text:style-name="T27">需扣掉 PPPoE header</text:span></text:p>
          </table:table-cell>
        </table:table-row>
        <table:table-row table:style-name="表格48.1">
          <table:table-cell table:style-name="表格48.A3" office:value-type="string">
            <text:p text:style-name="P15"><text:span text:style-name="T27">Loopback（本機）</text:span></text:p>
          </table:table-cell>
          <table:table-cell table:style-name="表格48.A3" office:value-type="string">
            <text:p text:style-name="P15"><text:span text:style-name="T27">65536 bytes</text:span></text:p>
          </table:table-cell>
          <table:table-cell table:style-name="表格48.A3" office:value-type="string">
            <text:p text:style-name="P15"><text:span text:style-name="T27">本機內部通訊</text:span>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8"><text:span text:style-name="T33">❗ <text:s/></text:span><text:span text:style-name="T39">重點</text:span></text:p>
            <text:p text:style-name="P19"><text:span text:style-name="T28">若封包大小 &gt; MTU，就必須「切開」才能傳送，這個動作就叫 Fragmentation（分段）。</text:span></text:p>
          </table:table-cell>
          <table:covered-table-cell/>
          <table:covered-table-cell/>
        </table:table-row>
      </table:table>
      <text:h text:style-name="P2" text:outline-level="2"><text:span text:style-name="T4">玖、Fragmentation（封包分段）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8"><text:span text:style-name="T33">📦 <text:s/></text:span><text:span text:style-name="T10">怎麼切？</text:span></text:p>
            <text:p text:style-name="P19"><text:span text:style-name="T28">範例：送出 4000 bytes、MTU = 1500（每段扣掉 20 bytes IP Header，剩 1480 可放資料）</text:span></text:p>
            <text:p text:style-name="P20"><text:span text:style-name="T28">第 1 段：1480 bytes｜第 2 段：1480 bytes｜第 3 段：1040 bytes</text:span>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13"><text:span text:style-name="T22">版本</text:span></text:p>
          </table:table-cell>
          <table:table-cell table:style-name="表格49.A2" office:value-type="string">
            <text:p text:style-name="P13"><text:span text:style-name="T22">誰負責分段</text:span></text:p>
          </table:table-cell>
          <table:table-cell table:style-name="表格49.A2" office:value-type="string">
            <text:p text:style-name="P13"><text:span text:style-name="T22">Router 可切？</text:span></text:p>
          </table:table-cell>
          <table:table-cell table:style-name="表格49.A2" office:value-type="string">
            <text:p text:style-name="P13"><text:span text:style-name="T22">說明</text:span></text:p>
          </table:table-cell>
        </table:table-row>
        <table:table-row table:style-name="表格49.1">
          <table:table-cell table:style-name="表格49.A3" office:value-type="string">
            <text:p text:style-name="P15"><text:span text:style-name="T27">IPv4</text:span></text:p>
          </table:table-cell>
          <table:table-cell table:style-name="表格49.A3" office:value-type="string">
            <text:p text:style-name="P15"><text:span text:style-name="T27">Router 或 Source</text:span></text:p>
          </table:table-cell>
          <table:table-cell table:style-name="表格49.A3" office:value-type="string">
            <text:p text:style-name="P15"><text:span text:style-name="T47">✅ 可以</text:span></text:p>
          </table:table-cell>
          <table:table-cell table:style-name="表格49.A3" office:value-type="string">
            <text:p text:style-name="P15"><text:span text:style-name="T27">封包到 Router 太大時，Router 直接幫你切</text:span></text:p>
          </table:table-cell>
        </table:table-row>
        <table:table-row table:style-name="表格49.1">
          <table:table-cell table:style-name="表格49.A4" office:value-type="string">
            <text:p text:style-name="P15"><text:span text:style-name="T27">IPv6</text:span></text:p>
          </table:table-cell>
          <table:table-cell table:style-name="表格49.A4" office:value-type="string">
            <text:p text:style-name="P15"><text:span text:style-name="T27">僅 Source（送端）</text:span></text:p>
          </table:table-cell>
          <table:table-cell table:style-name="表格49.A4" office:value-type="string">
            <text:p text:style-name="P15"><text:span text:style-name="T41">❌ 不行</text:span></text:p>
          </table:table-cell>
          <table:table-cell table:style-name="表格49.A4" office:value-type="string">
            <text:p text:style-name="P15"><text:span text:style-name="T27">Router 不分段，由送端自行處理，搭配 PMTUD</text:span></text:p>
          </table:table-cell>
        </table:table-row>
      </table:table>
      <text:h text:style-name="P2" text:outline-level="2"><text:span text:style-name="T4">拾、IP Header 關鍵欄位</text:span></text:h>
      <text:p text:style-name="P24"><text:span text:style-name="T28">每個封包都有一個「說明書」（IP Header），無選項時長度固定 20 bytes。最重要的 5 個欄位：</text:span>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9"><text:span text:style-name="T12">(1) Total Length：</text:span><text:span text:style-name="T28">封包總大小（Header + Data），最大 65535 bytes（16 bits）。</text:span></text:p>
            <text:p text:style-name="P20"><text:span text:style-name="T12">(2) Identification：</text:span><text:span text:style-name="T28">同一原始封包的所有分段共用同一 ID；接收端靠此 ID 判斷哪些 fragment 要拼在一起。</text:span></text:p>
            <text:p text:style-name="P20"><text:span text:style-name="T12">(3) Fragment Offset：</text:span><text:span text:style-name="T28">這段資料在原始封包中的「起始位置」。⚠️ 單位是 8 bytes（欄位僅 13 bits）→ Offset = 起始位置 ÷ 8。</text:span></text:p>
            <text:p text:style-name="P20"><text:span text:style-name="T12">(4) TTL：</text:span><text:span text:style-name="T28">最多可經過幾個 Router；每經過一個 −1，歸零時 Router 丟棄並回 ICMP「Time Exceeded」。常見初始值 Linux=64、Windows=128。traceroute 即利用 TTL。</text:span></text:p>
            <text:p text:style-name="P20"><text:span text:style-name="T12">(5) Protocol：</text:span><text:span text:style-name="T28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13"><text:span text:style-name="T22">計算範例（MTU=1500, Header=20, 資料=4000）</text:span></text:p>
          </table:table-cell>
          <table:covered-table-cell/>
          <table:covered-table-cell/>
          <table:table-cell table:style-name="表格50.A2" office:value-type="string">
            <text:p text:style-name="P13"><text:span text:style-name="T22">Offset 計算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15"><text:span text:style-name="T27">第 1 段：資料 1480 bytes</text:span></text:p>
          </table:table-cell>
          <table:covered-table-cell/>
          <table:covered-table-cell/>
          <table:table-cell table:style-name="表格50.A3" office:value-type="string">
            <text:p text:style-name="P15"><text:span text:style-name="T27">0 ÷ 8 = 0</text:span>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15"><text:span text:style-name="T27">第 2 段：資料 1480 bytes</text:span></text:p>
          </table:table-cell>
          <table:covered-table-cell/>
          <table:covered-table-cell/>
          <table:table-cell table:style-name="表格50.A4" office:value-type="string">
            <text:p text:style-name="P15"><text:span text:style-name="T27">1480 ÷ 8 = 185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15"><text:span text:style-name="T27">第 3 段：資料 1040 bytes</text:span></text:p>
          </table:table-cell>
          <table:covered-table-cell/>
          <table:covered-table-cell/>
          <table:table-cell table:style-name="表格50.A3" office:value-type="string">
            <text:p text:style-name="P15"><text:span text:style-name="T27">2960 ÷ 8 = 370</text:span></text:p>
          </table:table-cell>
        </table:table-row>
        <table:table-row table:style-name="表格50.1">
          <table:table-cell table:style-name="表格50.A2" office:value-type="string">
            <text:p text:style-name="P12"><text:span text:style-name="T22">Protocol 值</text:span></text:p>
          </table:table-cell>
          <table:table-cell table:style-name="表格50.A2" office:value-type="string">
            <text:p text:style-name="P12"><text:span text:style-name="T22">對應協定</text:span></text:p>
          </table:table-cell>
          <table:table-cell table:style-name="表格50.A2" table:number-columns-spanned="2" office:value-type="string">
            <text:p text:style-name="P12"><text:span text:style-name="T22">常見用途</text:span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15"><text:span text:style-name="T27">1</text:span></text:p>
          </table:table-cell>
          <table:table-cell table:style-name="表格50.A3" office:value-type="string">
            <text:p text:style-name="P15"><text:span text:style-name="T27">ICMP</text:span></text:p>
          </table:table-cell>
          <table:table-cell table:style-name="表格50.A3" table:number-columns-spanned="2" office:value-type="string">
            <text:p text:style-name="P15"><text:span text:style-name="T27">ping、TTL 超時通知、Fragmentation 通知</text:span>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15"><text:span text:style-name="T27">6</text:span></text:p>
          </table:table-cell>
          <table:table-cell table:style-name="表格50.A4" office:value-type="string">
            <text:p text:style-name="P15"><text:span text:style-name="T27">TCP</text:span></text:p>
          </table:table-cell>
          <table:table-cell table:style-name="表格50.A4" table:number-columns-spanned="2" office:value-type="string">
            <text:p text:style-name="P15"><text:span text:style-name="T27">HTTP、HTTPS、SSH、FTP 等需要可靠傳輸</text:span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15"><text:span text:style-name="T27">17</text:span></text:p>
          </table:table-cell>
          <table:table-cell table:style-name="表格50.A3" office:value-type="string">
            <text:p text:style-name="P15"><text:span text:style-name="T27">UDP</text:span></text:p>
          </table:table-cell>
          <table:table-cell table:style-name="表格50.A3" table:number-columns-spanned="2" office:value-type="string">
            <text:p text:style-name="P15"><text:span text:style-name="T27">DNS、DHCP、影音串流等速度優先</text:span></text:p>
          </table:table-cell>
          <table:covered-table-cell/>
        </table:table-row>
      </table:table>
      <text:h text:style-name="P2" text:outline-level="2"><text:soft-page-break/><text:span text:style-name="T4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13"><text:span text:style-name="T22">Flag</text:span></text:p>
            </table:table-cell>
            <table:table-cell table:style-name="表格51.A1" office:value-type="string">
              <text:p text:style-name="P13"><text:span text:style-name="T22">全名</text:span></text:p>
            </table:table-cell>
            <table:table-cell table:style-name="表格51.A1" office:value-type="string">
              <text:p text:style-name="P13"><text:span text:style-name="T22">值 = 1 代表</text:span></text:p>
            </table:table-cell>
            <table:table-cell table:style-name="表格51.A1" office:value-type="string">
              <text:p text:style-name="P13"><text:span text:style-name="T22">值 = 0 代表</text:span>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15"><text:span text:style-name="T27">DF</text:span></text:p>
          </table:table-cell>
          <table:table-cell table:style-name="表格51.A2" office:value-type="string">
            <text:p text:style-name="P15"><text:span text:style-name="T27">Don't Fragment</text:span></text:p>
          </table:table-cell>
          <table:table-cell table:style-name="表格51.A2" office:value-type="string">
            <text:p text:style-name="P15"><text:span text:style-name="T27">❌ 不准切！超大就丟並回 ICMP</text:span></text:p>
          </table:table-cell>
          <table:table-cell table:style-name="表格51.A2" office:value-type="string">
            <text:p text:style-name="P15"><text:span text:style-name="T27">允許分段（一般封包）</text:span></text:p>
          </table:table-cell>
        </table:table-row>
        <table:table-row table:style-name="表格51.1">
          <table:table-cell table:style-name="表格51.A3" office:value-type="string">
            <text:p text:style-name="P15"><text:span text:style-name="T27">MF</text:span></text:p>
          </table:table-cell>
          <table:table-cell table:style-name="表格51.A3" office:value-type="string">
            <text:p text:style-name="P15"><text:span text:style-name="T27">More Fragments</text:span></text:p>
          </table:table-cell>
          <table:table-cell table:style-name="表格51.A3" office:value-type="string">
            <text:p text:style-name="P15"><text:span text:style-name="T27">後面還有更多分段</text:span></text:p>
          </table:table-cell>
          <table:table-cell table:style-name="表格51.A3" office:value-type="string">
            <text:p text:style-name="P15"><text:span text:style-name="T27">這是最後一段（或未分段）</text:span>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8"><text:span text:style-name="T33">▸ <text:s/></text:span><text:span text:style-name="T10">DF = 1 的完整流程</text:span></text:p>
            <text:p text:style-name="P19"><text:span text:style-name="T28">① 送出封包（DF=1，不准切）→ ② 到某 Router，發現封包 &gt; 該路段 MTU → ③ Router 不能切，直接丟棄 → ④ Router 回傳 ICMP「Fragmentation Needed」（含可用 MTU 大小）→ ⑤ 送端調整封包大小後重送。這就是 PMTUD 的核心機制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pan text:style-name="T4">拾貳、PMTUD（路徑 MTU 探測）</text:span></text:h>
      <text:p text:style-name="P24"><text:span text:style-name="T28">PMTUD ＝ Path MTU Discovery，自動找出來源到目的地整條路徑中最小的 MTU 值。網路路徑可能途經不同網路（Ethernet → PPPoE → Wi-Fi），封包必須符合「最小的那個 MTU」才能全程通過。</text:span>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13"><text:span text:style-name="T22">版本</text:span></text:p>
            </table:table-cell>
            <table:table-cell table:style-name="表格52.A1" office:value-type="string">
              <text:p text:style-name="P13"><text:span text:style-name="T22">Router 可分段？</text:span></text:p>
            </table:table-cell>
            <table:table-cell table:style-name="表格52.A1" office:value-type="string">
              <text:p text:style-name="P13"><text:span text:style-name="T22">PMTUD 必要性</text:span></text:p>
            </table:table-cell>
            <table:table-cell table:style-name="表格52.A1" office:value-type="string">
              <text:p text:style-name="P13"><text:span text:style-name="T22">Router 回應訊息</text:span>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15"><text:span text:style-name="T27">IPv4</text:span></text:p>
          </table:table-cell>
          <table:table-cell table:style-name="表格52.A2" office:value-type="string">
            <text:p text:style-name="P15"><text:span text:style-name="T27">✅ 可以（但不推薦）</text:span></text:p>
          </table:table-cell>
          <table:table-cell table:style-name="表格52.A2" office:value-type="string">
            <text:p text:style-name="P15"><text:span text:style-name="T27">可選，但建議使用</text:span></text:p>
          </table:table-cell>
          <table:table-cell table:style-name="表格52.A2" office:value-type="string">
            <text:p text:style-name="P15"><text:span text:style-name="T27">ICMP Fragmentation Needed</text:span></text:p>
          </table:table-cell>
        </table:table-row>
        <table:table-row table:style-name="表格52.1">
          <table:table-cell table:style-name="表格52.A3" office:value-type="string">
            <text:p text:style-name="P15"><text:span text:style-name="T27">IPv6</text:span></text:p>
          </table:table-cell>
          <table:table-cell table:style-name="表格52.A3" office:value-type="string">
            <text:p text:style-name="P15"><text:span text:style-name="T27">❌ 不行</text:span></text:p>
          </table:table-cell>
          <table:table-cell table:style-name="表格52.A3" office:value-type="string">
            <text:p text:style-name="P15"><text:span text:style-name="T27">⚠️ 必須使用</text:span></text:p>
          </table:table-cell>
          <table:table-cell table:style-name="表格52.A3" office:value-type="string">
            <text:p text:style-name="P15"><text:span text:style-name="T27">ICMPv6 Packet Too Big</text:span></text:p>
          </table:table-cell>
        </table:table-row>
      </table:table>
      <text:h text:style-name="P2" text:outline-level="2"><text:span text:style-name="T4">拾參、TCP 如何避免 Fragmentation？</text:span></text:h>
      <text:p text:style-name="P24"><text:span text:style-name="T28">TCP 不依賴 IP 層切封包，而是「自己先控制好大小」，讓 IP 層根本不需要切。</text:span>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9"><text:span text:style-name="T12">MSS（Maximum Segment Size）：</text:span><text:span text:style-name="T28">MSS = MTU − IP Header − TCP Header = 1500 − 20 − 20 = 1460 bytes。三向交握時雙方各自宣告 MSS，之後每段 ≤ MSS，讓 IP 層不需分段。</text:span></text:p>
            <text:p text:style-name="P20"><text:span text:style-name="T12">搭配 DF=1 + PMTUD：</text:span><text:span text:style-name="T28">TCP 連線設 DF=1 禁止 Router 分段；若收到 ICMP「Fragmentation Needed」，自動調低 MSS 重試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18"><text:span text:style-name="T33">✅ <text:s/></text:span><text:span text:style-name="T45">結論</text:span></text:p>
            <text:p text:style-name="P19"><text:span text:style-name="T28">TCP = 主動控制大小（MSS）＋ DF=1 ＋ PMTUD，從源頭就避免 Fragmentation 發生。</text:span></text:p>
          </table:table-cell>
        </table:table-row>
      </table:table>
      <text:h text:style-name="P2" text:outline-level="2"><text:span text:style-name="T4">拾肆、Fragmentation DoS 攻擊</text:span></text:h>
      <text:p text:style-name="P24"><text:span text:style-name="T28">攻擊者利用「接收端重組封包很耗資源」這個特性，刻意製造大量異常 Fragment。正常重組流程：收到 Fragment 放入緩衝區 → 等同一 ID 的所有 Fragment 到齊 → 依 Offset 排序 → 拼回原始封包；每步都消耗 RAM 與 CPU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13"><text:span text:style-name="T25">攻擊手法</text:span></text:p>
            </table:table-cell>
            <table:table-cell table:style-name="表格54.A1" office:value-type="string">
              <text:p text:style-name="P13"><text:span text:style-name="T25">做法</text:span></text:p>
            </table:table-cell>
            <table:table-cell table:style-name="表格54.A1" office:value-type="string">
              <text:p text:style-name="P13"><text:span text:style-name="T25">後果</text:span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15"><text:span text:style-name="T31">1 不完整 Fragment</text:span></text:p>
          </table:table-cell>
          <table:table-cell table:style-name="表格54.A2" office:value-type="string">
            <text:p text:style-name="P15"><text:span text:style-name="T31">只送部分分段（缺其中一段）</text:span></text:p>
          </table:table-cell>
          <table:table-cell table:style-name="表格54.A2" office:value-type="string">
            <text:p text:style-name="P15"><text:span text:style-name="T31">接收端一直等待不敢丟棄 → RAM 持續被占用</text:span></text:p>
          </table:table-cell>
        </table:table-row>
        <table:table-row table:style-name="表格54.1">
          <table:table-cell table:style-name="表格54.A3" office:value-type="string">
            <text:p text:style-name="P15"><text:span text:style-name="T31">2 Offset 重疊</text:span></text:p>
          </table:table-cell>
          <table:table-cell table:style-name="表格54.A3" office:value-type="string">
            <text:p text:style-name="P15"><text:span text:style-name="T31">送出 Offset 互相重疊的 Fragment</text:span></text:p>
          </table:table-cell>
          <table:table-cell table:style-name="表格54.A3" office:value-type="string">
            <text:p text:style-name="P15"><text:span text:style-name="T31">接收端須判斷哪個才是正確資料 → CPU 暴增</text:span></text:p>
          </table:table-cell>
        </table:table-row>
        <table:table-row table:style-name="表格54.1">
          <table:table-cell table:style-name="表格54.A2" office:value-type="string">
            <text:p text:style-name="P15"><text:span text:style-name="T31">3 大量碎片</text:span></text:p>
          </table:table-cell>
          <table:table-cell table:style-name="表格54.A2" office:value-type="string">
            <text:p text:style-name="P15"><text:span text:style-name="T31">送出數萬個 Fragment（同一 ID）</text:span></text:p>
          </table:table-cell>
          <table:table-cell table:style-name="表格54.A2" office:value-type="string">
            <text:p text:style-name="P15"><text:span text:style-name="T31">開大量 buffer、持續重組 → RAM 耗盡</text:span>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8"><text:span text:style-name="T33">🛡️ <text:s/></text:span><text:span text:style-name="T45">防禦方式</text:span></text:p>
            <text:p text:style-name="P19"><text:span text:style-name="T28">防禦：設定重組 buffer 上限避免無限占用記憶體；丟棄等待過久或異常的 Fragment；部署 IDS / Firewall 偵測異常分段模式。</text:span></text:p>
          </table:table-cell>
          <table:covered-table-cell/>
          <table:covered-table-cell/>
        </table:table-row>
      </table:table>
      <text:h text:style-name="P2" text:outline-level="2"><text:soft-page-break/><text:span text:style-name="T4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13"><text:span text:style-name="T22">技術概念</text:span></text:p>
            </table:table-cell>
            <table:table-cell table:style-name="表格55.A1" office:value-type="string">
              <text:p text:style-name="P13"><text:span text:style-name="T22">白話比喻</text:span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15"><text:span text:style-name="T27">MTU</text:span></text:p>
          </table:table-cell>
          <table:table-cell table:style-name="表格55.A2" office:value-type="string">
            <text:p text:style-name="P15"><text:span text:style-name="T27">一個貨運箱子最多裝 1500g</text:span></text:p>
          </table:table-cell>
        </table:table-row>
        <table:table-row table:style-name="表格55.1">
          <table:table-cell table:style-name="表格55.A3" office:value-type="string">
            <text:p text:style-name="P15"><text:span text:style-name="T27">Fragmentation</text:span></text:p>
          </table:table-cell>
          <table:table-cell table:style-name="表格55.A3" office:value-type="string">
            <text:p text:style-name="P15"><text:span text:style-name="T27">東西太重 → 分成好幾箱</text:span></text:p>
          </table:table-cell>
        </table:table-row>
        <table:table-row table:style-name="表格55.1">
          <table:table-cell table:style-name="表格55.A2" office:value-type="string">
            <text:p text:style-name="P15"><text:span text:style-name="T27">Identification</text:span></text:p>
          </table:table-cell>
          <table:table-cell table:style-name="表格55.A2" office:value-type="string">
            <text:p text:style-name="P15"><text:span text:style-name="T27">每箱貼上同一個「訂單號碼」</text:span></text:p>
          </table:table-cell>
        </table:table-row>
        <table:table-row table:style-name="表格55.1">
          <table:table-cell table:style-name="表格55.A3" office:value-type="string">
            <text:p text:style-name="P15"><text:span text:style-name="T27">Fragment Offset</text:span></text:p>
          </table:table-cell>
          <table:table-cell table:style-name="表格55.A3" office:value-type="string">
            <text:p text:style-name="P15"><text:span text:style-name="T27">每箱寫上「我是第幾克開始的貨」</text:span></text:p>
          </table:table-cell>
        </table:table-row>
        <table:table-row table:style-name="表格55.1">
          <table:table-cell table:style-name="表格55.A2" office:value-type="string">
            <text:p text:style-name="P15"><text:span text:style-name="T27">IPv4 / IPv6</text:span></text:p>
          </table:table-cell>
          <table:table-cell table:style-name="表格55.A2" office:value-type="string">
            <text:p text:style-name="P15"><text:span text:style-name="T27">IPv4：郵局可幫你分箱（但最好自己分）／ IPv6：郵局不幫分，你一定要自己分好</text:span></text:p>
          </table:table-cell>
        </table:table-row>
        <table:table-row table:style-name="表格55.1">
          <table:table-cell table:style-name="表格55.A3" office:value-type="string">
            <text:p text:style-name="P15"><text:span text:style-name="T27">DF = 1</text:span></text:p>
          </table:table-cell>
          <table:table-cell table:style-name="表格55.A3" office:value-type="string">
            <text:p text:style-name="P15"><text:span text:style-name="T27">貼上「禁止拆箱」標籤 → 太重就退件</text:span></text:p>
          </table:table-cell>
        </table:table-row>
        <table:table-row table:style-name="表格55.1">
          <table:table-cell table:style-name="表格55.A2" office:value-type="string">
            <text:p text:style-name="P15"><text:span text:style-name="T27">PMTUD</text:span></text:p>
          </table:table-cell>
          <table:table-cell table:style-name="表格55.A2" office:value-type="string">
            <text:p text:style-name="P15"><text:span text:style-name="T27">先試寄 → 被退 → 知道上限 → 調整大小再寄</text:span></text:p>
          </table:table-cell>
        </table:table-row>
        <table:table-row table:style-name="表格55.1">
          <table:table-cell table:style-name="表格55.A3" office:value-type="string">
            <text:p text:style-name="P15"><text:span text:style-name="T27">TTL</text:span></text:p>
          </table:table-cell>
          <table:table-cell table:style-name="表格55.A3" office:value-type="string">
            <text:p text:style-name="P15"><text:span text:style-name="T27">貨物限轉 64 次，超過就銷毀</text:span></text:p>
          </table:table-cell>
        </table:table-row>
        <table:table-row table:style-name="表格55.1">
          <table:table-cell table:style-name="表格55.A2" office:value-type="string">
            <text:p text:style-name="P15"><text:span text:style-name="T27">MSS</text:span></text:p>
          </table:table-cell>
          <table:table-cell table:style-name="表格55.A2" office:value-type="string">
            <text:p text:style-name="P15"><text:span text:style-name="T27">你自己量好每箱重量，確保不超重</text:span></text:p>
          </table:table-cell>
        </table:table-row>
      </table:table>
      <text:h text:style-name="P1" text:outline-level="1"><text:span text:style-name="T23">第 三 篇　IPv4 → IPv6 過渡技術</text:span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8"><text:span text:style-name="T33">💡 <text:s/></text:span><text:span text:style-name="T10">為什麼要從 IPv4 換到 IPv6？</text:span></text:p>
            <text:p text:style-name="P19"><text:span text:style-name="T28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span></text:p>
          </table:table-cell>
        </table:table-row>
      </table:table>
      <text:h text:style-name="P2" text:outline-level="2"><text:span text:style-name="T4">一、IPv4 vs IPv6 完整比較</text:span>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13"><text:span text:style-name="T22">比較項目</text:span></text:p>
            </table:table-cell>
            <table:table-cell table:style-name="表格57.A1" office:value-type="string">
              <text:p text:style-name="P13"><text:span text:style-name="T22">✗ IPv4 問題</text:span></text:p>
            </table:table-cell>
            <table:table-cell table:style-name="表格57.A1" office:value-type="string">
              <text:p text:style-name="P13"><text:span text:style-name="T22">✓ IPv6 改進</text:span></text:p>
            </table:table-cell>
          </table:table-row>
        </table:table-header-rows>
        <table:table-row table:style-name="表格57.1">
          <table:table-cell table:style-name="表格57.A2" office:value-type="string">
            <text:p text:style-name="P15"><text:span text:style-name="T27">位址長度</text:span></text:p>
          </table:table-cell>
          <table:table-cell table:style-name="表格57.A2" office:value-type="string">
            <text:p text:style-name="P15"><text:span text:style-name="T27">32 bit，約 43 億個 IP，已嚴重不足</text:span></text:p>
          </table:table-cell>
          <table:table-cell table:style-name="表格57.A2" office:value-type="string">
            <text:p text:style-name="P15"><text:span text:style-name="T27">128 bit，約 3.4×10³⁸ 個，幾乎用不完</text:span></text:p>
          </table:table-cell>
        </table:table-row>
        <table:table-row table:style-name="表格57.1">
          <table:table-cell table:style-name="表格57.A3" office:value-type="string">
            <text:p text:style-name="P15"><text:span text:style-name="T27">NAT 位址轉換</text:span></text:p>
          </table:table-cell>
          <table:table-cell table:style-name="表格57.A3" office:value-type="string">
            <text:p text:style-name="P15"><text:span text:style-name="T27">需 NAT 共用 IP，破壞 End-to-End</text:span></text:p>
          </table:table-cell>
          <table:table-cell table:style-name="表格57.A3" office:value-type="string">
            <text:p text:style-name="P15"><text:span text:style-name="T27">每裝置獨立公開 IP，不需 NAT，恢復 E2E</text:span></text:p>
          </table:table-cell>
        </table:table-row>
        <table:table-row table:style-name="表格57.1">
          <table:table-cell table:style-name="表格57.A2" office:value-type="string">
            <text:p text:style-name="P15"><text:span text:style-name="T27">安全性</text:span></text:p>
          </table:table-cell>
          <table:table-cell table:style-name="表格57.A2" office:value-type="string">
            <text:p text:style-name="P15"><text:span text:style-name="T27">無內建加密／驗證，須另裝 VPN</text:span></text:p>
          </table:table-cell>
          <table:table-cell table:style-name="表格57.A2" office:value-type="string">
            <text:p text:style-name="P15"><text:span text:style-name="T27">支援 IPsec（加密＋驗證）※ RFC 6434 後改建議</text:span></text:p>
          </table:table-cell>
        </table:table-row>
        <table:table-row table:style-name="表格57.1">
          <table:table-cell table:style-name="表格57.A3" office:value-type="string">
            <text:p text:style-name="P15"><text:span text:style-name="T27">Header 結構</text:span></text:p>
          </table:table-cell>
          <table:table-cell table:style-name="表格57.A3" office:value-type="string">
            <text:p text:style-name="P15"><text:span text:style-name="T27">可變長度含 Options，Router 效率低</text:span></text:p>
          </table:table-cell>
          <table:table-cell table:style-name="表格57.A3" office:value-type="string">
            <text:p text:style-name="P15"><text:span text:style-name="T27">固定 40 bytes 基本 Header，轉送更快</text:span></text:p>
          </table:table-cell>
        </table:table-row>
        <table:table-row table:style-name="表格57.1">
          <table:table-cell table:style-name="表格57.A2" office:value-type="string">
            <text:p text:style-name="P15"><text:span text:style-name="T27">服務品質 QoS</text:span></text:p>
          </table:table-cell>
          <table:table-cell table:style-name="表格57.A2" office:value-type="string">
            <text:p text:style-name="P15"><text:span text:style-name="T27">無法有效標記流量優先權</text:span></text:p>
          </table:table-cell>
          <table:table-cell table:style-name="表格57.A2" office:value-type="string">
            <text:p text:style-name="P15"><text:span text:style-name="T27">Flow Label 欄位，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15"><text:span text:style-name="T27">廣播方式</text:span></text:p>
          </table:table-cell>
          <table:table-cell table:style-name="表格57.A3" office:value-type="string">
            <text:p text:style-name="P15"><text:span text:style-name="T27">Broadcast：一次發給所有人，浪費頻寬</text:span></text:p>
          </table:table-cell>
          <table:table-cell table:style-name="表格57.A3" office:value-type="string">
            <text:p text:style-name="P15"><text:span text:style-name="T27">改用 Multicast（群播）／ Anycast（任播）</text:span></text:p>
          </table:table-cell>
        </table:table-row>
        <table:table-row table:style-name="表格57.1">
          <table:table-cell table:style-name="表格57.A2" office:value-type="string">
            <text:p text:style-name="P15"><text:span text:style-name="T27">IP 配置方式</text:span></text:p>
          </table:table-cell>
          <table:table-cell table:style-name="表格57.A2" office:value-type="string">
            <text:p text:style-name="P15"><text:span text:style-name="T27">需手動設定或 DHCP，管理繁瑣</text:span></text:p>
          </table:table-cell>
          <table:table-cell table:style-name="表格57.A2" office:value-type="string">
            <text:p text:style-name="P15"><text:span text:style-name="T27">SLAAC 無狀態自動配置，插網路即取得 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8"><text:span text:style-name="T33">📌 <text:s/></text:span><text:span text:style-name="T39">補充：IPsec 強制 vs 建議</text:span></text:p>
            <text:p text:style-name="P19"><text:span text:style-name="T28">IPv6 早期規範（RFC 2460）將 IPsec 列為「強制」；2011 年 RFC 6434 修訂後改為「建議（SHOULD）」。考試普遍仍以「原生支援 IPsec」作為 IPv6 改進特色，此處標注供參考。</text:span></text:p>
          </table:table-cell>
          <table:covered-table-cell/>
          <table:covered-table-cell/>
        </table:table-row>
      </table:table>
      <text:h text:style-name="P2" text:outline-level="2"><text:span text:style-name="T4">二、三種 IPv4 → IPv6 過渡技術</text:span>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9"><text:span text:style-name="T36">① Dual Stack（雙協定堆疊）— 最常用、最推薦</text:span></text:p>
            <text:p text:style-name="P20"><text:span text:style-name="T28">裝置同時具備 IPv4 與 IPv6 兩套協定堆疊。DNS A record → 回傳 IPv4；DNS AAAA record → 回傳 IPv6。連線時優先選用 IPv6，對端不支援則自動退回 IPv4。不需任何封包轉換，效能損耗最低。</text:span></text:p>
            <text:p text:style-name="P20"><text:span text:style-name="T28">流程：輸入 google.com → DNS 回傳 A＋AAAA → 優先選 IPv6 → 直接連線（無需轉換）。</text:span></text:p>
          </table:table-cell>
        </table:table-row>
        <table:table-row table:style-name="表格58.1">
          <table:table-cell table:style-name="表格58.A2" office:value-type="string">
            <text:p text:style-name="P19"><text:span text:style-name="T38">② Tunneling（隧道技術）— 過渡期橋接方案</text:span></text:p>
            <text:p text:style-name="P20"><text:span text:style-name="T28">中間網路只支援 IPv4，無法直接傳送 IPv6 封包。解法：將 IPv6 封包完整封裝進 IPv4 外殼，抵達目的地後拆除外層 IPv4、還原 IPv6 封包。常見技術：6in4、6to4、Teredo、ISATAP。</text:span></text:p>
            <text:p text:style-name="P20"><text:span text:style-name="T28">示意：[ IPv4 外層 Header ][ IPv6 封包（完整保留）] → 目的地拆除外殼 → 還原 IPv6。</text:span></text:p>
          </table:table-cell>
        </table:table-row>
        <table:table-row table:style-name="表格58.1">
          <table:table-cell table:style-name="表格58.A3" office:value-type="string">
            <text:p text:style-name="P19"><text:span text:style-name="T50">③ Translation（NAT64）— 協定轉換、互通最後手段</text:span></text:p>
            <text:p text:style-name="P20"><text:span text:style-name="T28">適用場景：IPv6-only 裝置需與 IPv4-only 裝置直接通訊。透過轉換閘道器即時將封包表頭轉換為對方格式。代表技術：NAT64 + DNS64。複雜度最高，有額外效能損耗。</text:span></text:p>
            <text:p text:style-name="P20"><text:span text:style-name="T28">示意：IPv6 裝置 → [ NAT64 轉換閘道 ] → IPv4 裝置（雙向互轉）。</text:span></text:p>
          </table:table-cell>
        </table:table-row>
      </table:table>
      <text:h text:style-name="P2" text:outline-level="2"><text:soft-page-break/><text:span text:style-name="T4">三、生活比喻（一次記住）</text:span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13"><text:span text:style-name="T24">技術</text:span></text:p>
            </table:table-cell>
            <table:table-cell table:style-name="表格59.A1" office:value-type="string">
              <text:p text:style-name="P13"><text:span text:style-name="T24">生活比喻</text:span>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15"><text:span text:style-name="T30">Dual Stack</text:span></text:p>
          </table:table-cell>
          <table:table-cell table:style-name="表格59.A2" office:value-type="string">
            <text:p text:style-name="P15"><text:span text:style-name="T30">你同時會中文 + 英文，遇到誰說哪個</text:span></text:p>
          </table:table-cell>
        </table:table-row>
        <table:table-row table:style-name="表格59.1">
          <table:table-cell table:style-name="表格59.A3" office:value-type="string">
            <text:p text:style-name="P15"><text:span text:style-name="T30">Tunneling</text:span></text:p>
          </table:table-cell>
          <table:table-cell table:style-name="表格59.A3" office:value-type="string">
            <text:p text:style-name="P15"><text:span text:style-name="T30">把英文信裝進中文信封偷渡過去，到目的地再打開</text:span></text:p>
          </table:table-cell>
        </table:table-row>
        <table:table-row table:style-name="表格59.1">
          <table:table-cell table:style-name="表格59.A2" office:value-type="string">
            <text:p text:style-name="P15"><text:span text:style-name="T30">Translation</text:span></text:p>
          </table:table-cell>
          <table:table-cell table:style-name="表格59.A2" office:value-type="string">
            <text:p text:style-name="P15"><text:span text:style-name="T30">現場請翻譯員即時口譯</text:span>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8"><text:span text:style-name="T33">🏠 <text:s/></text:span><text:span text:style-name="T10">用「寄信/門牌」理解</text:span></text:p>
            <text:p text:style-name="P19"><text:span text:style-name="T12">IPv4 的困境：</text:span><text:span text:style-name="T28">整棟公寓共用一個門牌（NAT），郵差只送到大門，裡面誰是誰要另外猜；地址快用光還在借號碼。</text:span></text:p>
            <text:p text:style-name="P20"><text:span text:style-name="T12">IPv6 的世界：</text:span><text:span text:style-name="T28">每個人都有獨立門牌（公開 IP），地址多到用不完，郵件直接送到本人手上，不需中間人轉達。</text:span></text:p>
          </table:table-cell>
          <table:covered-table-cell/>
        </table:table-row>
      </table:table>
      <text:h text:style-name="P2" text:outline-level="2"><text:span text:style-name="T4">四、考試速記版</text:span></text:h>
      <table:table table:name="表格60" table:style-name="表格60">
        <table:table-column table:style-name="表格60.A"/>
        <table:table-column table:style-name="表格60.B"/>
        <table:table-row table:style-name="表格60.1">
          <table:table-cell table:style-name="表格60.A1" table:number-columns-spanned="2" office:value-type="string">
            <text:p text:style-name="P18"><text:span text:style-name="T33">🧠 <text:s/></text:span><text:span text:style-name="T49">一句話記憶法</text:span></text:p>
            <text:p text:style-name="P19"><text:span text:style-name="T50">IPv6 特點：</text:span><text:span text:style-name="T28">大（128 bit）＋ 安全（IPsec）＋ 快（固定 Header）＋ 自動（SLAAC）＋ 乾淨（無 Broadcast）。</text:span></text:p>
            <text:p text:style-name="P20"><text:span text:style-name="T50">過渡技術：</text:span><text:span text:style-name="T28">雙語（Dual Stack）＋ 偽裝（Tunneling）＋ 翻譯（Translation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12"><text:span text:style-name="T22">IPv4 七大問題</text:span></text:p>
          </table:table-cell>
          <table:table-cell table:style-name="表格60.A2" office:value-type="string">
            <text:p text:style-name="P12"><text:span text:style-name="T22">IPv6 七大改進</text:span></text:p>
          </table:table-cell>
        </table:table-row>
        <table:table-row table:style-name="表格60.1">
          <table:table-cell table:style-name="表格60.A3" office:value-type="string">
            <text:p text:style-name="P15"><text:span text:style-name="T27">位址不足（32 bit）／需 NAT 破壞 E2E／無加密驗證／Header 可變效率低／缺 QoS／用 Broadcast 浪費／IP 需手動設定</text:span></text:p>
          </table:table-cell>
          <table:table-cell table:style-name="表格60.A3" office:value-type="string">
            <text:p text:style-name="P15"><text:span text:style-name="T27">128 bit 近乎無限／不需 NAT 恢復 E2E／支援 IPsec／固定 40 bytes 轉送快／Flow Label 支援 QoS／改用 Multicast/Anycast／SLAAC 自動配置</text:span></text:p>
          </table:table-cell>
        </table:table-row>
      </table:table>
      <text:h text:style-name="P1" text:outline-level="1"><text:span text:style-name="T23">第 四 篇　ARP、NAT 與完整上網流程</text:span>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8"><text:span text:style-name="T33">🔑 <text:s/></text:span><text:span text:style-name="T10">最基礎的比喻，先懂這個</text:span></text:p>
            <text:p text:style-name="P19"><text:span text:style-name="T29">IP 位址＝家庭住址</text:span><text:span text:style-name="T28">（192.168.1.5），找最終目的地；</text:span><text:span text:style-name="T29">MAC 位址＝身分證號碼</text:span><text:span text:style-name="T28">（AA:BB:CC:DD:EE），決定下一站交給哪台機器。</text:span></text:p>
            <text:p text:style-name="P20"><text:span text:style-name="T28">資料在網路中「實際傳送」靠 MAC，但我們只知道對方的 IP——所以需要一個轉換機制，這就是 ARP 的工作。</text:span></text:p>
          </table:table-cell>
        </table:table-row>
      </table:table>
      <text:h text:style-name="P2" text:outline-level="2"><text:span text:style-name="T4">一、ARP（Address Resolution Protocol）：IP → MAC</text:span></text:h>
      <text:p text:style-name="P24"><text:span text:style-name="T28">一句話定義：ARP ＝ 用 IP 找 MAC，只在同一個區域網路（LAN）內使用。</text:span>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8"><text:span text:style-name="T33">📋 <text:s/></text:span><text:span text:style-name="T10">ARP 運作流程（考試必考）</text:span></text:p>
            <text:p text:style-name="P19"><text:span text:style-name="T12">① 查 ARP Cache（筆記本）：</text:span><text:span text:style-name="T28">先查自己的記錄「我之前有沒有問過這個 IP？」有 → 直接用。</text:span></text:p>
            <text:p text:style-name="P20"><text:span text:style-name="T12">② 發出 ARP Request（廣播）：</text:span><text:span text:style-name="T28">沒記錄 → 對整個區網廣播「誰是 192.168.1.5？請告訴我你的 MAC！」所有機器都收到。</text:span></text:p>
            <text:p text:style-name="P20"><text:span text:style-name="T12">③ 收到 ARP Reply（單播回應）：</text:span><text:span text:style-name="T28">IP 是 192.168.1.5 的機器回應「我是！MAC 是 AA:BB:CC」，其餘機器靜默忽略。</text:span></text:p>
            <text:p text:style-name="P20"><text:span text:style-name="T12">④ 存進 ARP Cache：</text:span><text:span text:style-name="T28">把「IP ↔ MAC」對應記下，下次直接用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13"><text:span text:style-name="T22">項目</text:span></text:p>
          </table:table-cell>
          <table:table-cell table:style-name="表格62.A2" office:value-type="string">
            <text:p text:style-name="P13"><text:span text:style-name="T22">內容</text:span></text:p>
          </table:table-cell>
        </table:table-row>
        <table:table-row table:style-name="表格62.1">
          <table:table-cell table:style-name="表格62.A3" office:value-type="string">
            <text:p text:style-name="P15"><text:span text:style-name="T27">ARP Spoofing（ARP 欺騙）</text:span></text:p>
          </table:table-cell>
          <table:table-cell table:style-name="表格62.A3" office:value-type="string">
            <text:p text:style-name="P15"><text:span text:style-name="T27">攻擊者假冒他人的 MAC，讓封包被送到錯的地方 → 中間人攻擊（MITM）</text:span></text:p>
          </table:table-cell>
        </table:table-row>
        <table:table-row table:style-name="表格62.1">
          <table:table-cell table:style-name="表格62.A4" office:value-type="string">
            <text:p text:style-name="P15"><text:span text:style-name="T27">arp -a</text:span></text:p>
          </table:table-cell>
          <table:table-cell table:style-name="表格62.A4" office:value-type="string">
            <text:p text:style-name="P15"><text:span text:style-name="T27">查看本機的 ARP 對應表（IP ↔ MAC 清單）</text:span></text:p>
          </table:table-cell>
        </table:table-row>
        <table:table-row table:style-name="表格62.1">
          <table:table-cell table:style-name="表格62.A3" office:value-type="string">
            <text:p text:style-name="P15"><text:span text:style-name="T27">ping [IP]</text:span></text:p>
          </table:table-cell>
          <table:table-cell table:style-name="表格62.A3" office:value-type="string">
            <text:p text:style-name="P15"><text:span text:style-name="T27">觸發 ARP 運作，讓電腦主動查詢對應 MAC</text:span></text:p>
          </table:table-cell>
        </table:table-row>
      </table:table>
      <text:h text:style-name="P2" text:outline-level="2"><text:span text:style-name="T4">二、NAT（Network Address Translation）：私網 → 公網</text:span></text:h>
      <text:p text:style-name="P24"><text:span text:style-name="T28">一句話定義：NAT ＝ 路由器幫你把「私有 IP」改成「公網 IP」，讓內部機器能夠上網。私有 IP（如 192.168.1.2）外網看不到，只在家裡用；路由器的公網 IP（220.x.x.x，ISP 分配）外網才認識。</text:span>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8"><text:span text:style-name="T33">▸ <text:s/></text:span><text:span text:style-name="T10">NAT 運作流程</text:span></text:p>
            <text:p text:style-name="P19"><text:span text:style-name="T28">① 你的電腦（192.168.1.2）發送資料給 Google → ② 封包抵達路由器，NAT 把來源 IP 改成公網 IP（220.x.x.x）對外偽裝身份 → ③ Google 收到，回應給公網 IP（220.x.x.x）→ ④ 路由器把目的地 IP 換回 192.168.1.2，轉發給你的電腦。</text:span>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13"><text:span text:style-name="T22">類型</text:span></text:p>
          </table:table-cell>
          <table:table-cell table:style-name="表格63.A2" office:value-type="string">
            <text:p text:style-name="P13"><text:span text:style-name="T22">中文</text:span></text:p>
          </table:table-cell>
          <table:table-cell table:style-name="表格63.A2" office:value-type="string">
            <text:p text:style-name="P13"><text:span text:style-name="T22">說明</text:span></text:p>
          </table:table-cell>
          <table:table-cell table:style-name="表格63.A2" office:value-type="string">
            <text:p text:style-name="P13"><text:span text:style-name="T22">特點</text:span></text:p>
          </table:table-cell>
        </table:table-row>
        <table:table-row table:style-name="表格63.1">
          <table:table-cell table:style-name="表格63.A3" office:value-type="string">
            <text:p text:style-name="P15"><text:span text:style-name="T27">Static NAT</text:span></text:p>
          </table:table-cell>
          <table:table-cell table:style-name="表格63.A3" office:value-type="string">
            <text:p text:style-name="P15"><text:span text:style-name="T27">靜態 NAT</text:span></text:p>
          </table:table-cell>
          <table:table-cell table:style-name="表格63.A3" office:value-type="string">
            <text:p text:style-name="P15"><text:span text:style-name="T27">一個私有 IP ↔ 一個公網 IP</text:span></text:p>
          </table:table-cell>
          <table:table-cell table:style-name="表格63.A3" office:value-type="string">
            <text:p text:style-name="P15"><text:span text:style-name="T27">固定對應</text:span></text:p>
          </table:table-cell>
        </table:table-row>
        <table:table-row table:style-name="表格63.1">
          <table:table-cell table:style-name="表格63.A4" office:value-type="string">
            <text:p text:style-name="P15"><text:span text:style-name="T27">Dynamic NAT</text:span></text:p>
          </table:table-cell>
          <table:table-cell table:style-name="表格63.A4" office:value-type="string">
            <text:p text:style-name="P15"><text:span text:style-name="T27">動態 NAT</text:span></text:p>
          </table:table-cell>
          <table:table-cell table:style-name="表格63.A4" office:value-type="string">
            <text:p text:style-name="P15"><text:span text:style-name="T27">多個私有 IP 對應 IP 池（pool）</text:span></text:p>
          </table:table-cell>
          <table:table-cell table:style-name="表格63.A4" office:value-type="string">
            <text:p text:style-name="P15"><text:span text:style-name="T27">動態分配</text:span></text:p>
          </table:table-cell>
        </table:table-row>
        <table:table-row table:style-name="表格63.1">
          <table:table-cell table:style-name="表格63.A3" office:value-type="string">
            <text:p text:style-name="P15"><text:span text:style-name="T27">PAT</text:span></text:p>
          </table:table-cell>
          <table:table-cell table:style-name="表格63.A3" office:value-type="string">
            <text:p text:style-name="P15"><text:span text:style-name="T27">連接埠位址轉換</text:span></text:p>
          </table:table-cell>
          <table:table-cell table:style-name="表格63.A3" office:value-type="string">
            <text:p text:style-name="P15"><text:span text:style-name="T27">多台共用一個公網 IP</text:span></text:p>
          </table:table-cell>
          <table:table-cell table:style-name="表格63.A3" office:value-type="string">
            <text:p text:style-name="P15"><text:span text:style-name="T27">靠 Port 區分（最重要）</text:span>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8"><text:span text:style-name="T33">⚠️ <text:s/></text:span><text:span text:style-name="T39">NAT 的缺點（考試超愛）</text:span></text:p>
            <text:p text:style-name="P19"><text:span text:style-name="T38">破壞 End-to-End 連線（最重要）：</text:span><text:span text:style-name="T28">原本你↔對方是真正點對點；有 NAT 後變成你→NAT→對方，多一層轉換，不再是端對端。</text:span></text:p>
            <text:p text:style-name="P20"><text:span text:style-name="T38">P2P / VoIP 難以運作：</text:span><text:span text:style-name="T28">外部機器找不到你（被藏在 NAT 後），P2P 下載、VoIP 通話等直連功能受限。</text:span></text:p>
            <text:p text:style-name="P20"><text:soft-page-break/><text:span text:style-name="T38">增加延遲：</text:span><text:span text:style-name="T28">每個封包都需要多一道 IP 轉換處理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pan text:style-name="T4">三、解決 NAT 限制的三種方法</text:span></text:h>
      <text:p text:style-name="P24"><text:span text:style-name="T28">核心問題：外面的人只看到一個公網 IP，但內部有多台機器，路由器不知道要轉給哪一台。</text:span>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19"><text:span text:style-name="T12">方法一：Port Forwarding（手動指定轉發）</text:span></text:p>
            <text:p text:style-name="P20"><text:span text:style-name="T28">比喻：Port＝房間號碼；NAT 路由器＝大樓；Port Forwarding＝門口指示牌「80 號房 → 192.168.1.2」。例：220.x.x.x:80 → 192.168.1.2:80（網頁）；220.x.x.x:25565 → 192.168.1.2:25565（Minecraft）。</text:span></text:p>
            <text:p text:style-name="P20"><text:span text:style-name="T29">優點：</text:span><text:span text:style-name="T28">設定直接、穩定，可精確控制。</text:span><text:span text:style-name="T29">缺點：</text:span><text:span text:style-name="T28">每個服務都要手動設定，IP 改變要重設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19"><text:span text:style-name="T36">方法二：UPnP（自動版 Port Forwarding）</text:span></text:p>
            <text:p text:style-name="P20"><text:span text:style-name="T28">讓裝置自動跟路由器要求「幫我開一個 Port」，不需人工設定。① 應用程式發 UPnP 請求 → ② 路由器自動新增 Port Forwarding 規則 → ③ 服務結束後自動清除（理想情況）。</text:span></text:p>
            <text:p text:style-name="P20"><text:span text:style-name="T29">優點：</text:span><text:span text:style-name="T28">全自動、對一般用戶友善。</text:span><text:span text:style-name="T43">安全風險（重要）：</text:span><text:span text:style-name="T28">惡意程式也能透過 UPnP 自動開 Port，可能讓攻擊者直接連入內網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19"><text:span text:style-name="T50">方法三：STUN（打洞技術）</text:span></text:p>
            <text:p text:style-name="P20"><text:span text:style-name="T28">使用情境：兩端都在各自 NAT 後面，彼此都是私有 IP、互相找不到。STUN 先幫每端「查清楚自己對外的公網 IP + Port」，再交換資訊嘗試直接打通。</text:span></text:p>
            <text:p text:style-name="P20"><text:span text:style-name="T28">① 問 STUN 伺服器「我對外的 IP 和 Port 是什麼？」② STUN 回「你對外是 220.x.x.x:12345」③ 朋友也做同樣的事 → ④ 兩端透過第三方交換彼此公網位址 → ⑤ 同時互相發送封包打洞（Hole Punching）。</text:span></text:p>
            <text:p text:style-name="P20"><text:span text:style-name="T43">重要限制：</text:span><text:span text:style-name="T28">STUN 只對部分 NAT 類型有效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13"><text:span text:style-name="T22">方法</text:span></text:p>
          </table:table-cell>
          <table:table-cell table:style-name="表格64.A4" office:value-type="string">
            <text:p text:style-name="P13"><text:span text:style-name="T22">設定方式</text:span></text:p>
          </table:table-cell>
          <table:table-cell table:style-name="表格64.A4" office:value-type="string">
            <text:p text:style-name="P13"><text:span text:style-name="T22">典型場景</text:span></text:p>
          </table:table-cell>
          <table:table-cell table:style-name="表格64.A4" office:value-type="string">
            <text:p text:style-name="P13"><text:span text:style-name="T22">主要限制</text:span></text:p>
          </table:table-cell>
        </table:table-row>
        <table:table-row table:style-name="表格64.1">
          <table:table-cell table:style-name="表格64.A5" office:value-type="string">
            <text:p text:style-name="P15"><text:span text:style-name="T27">Port Forwarding</text:span></text:p>
          </table:table-cell>
          <table:table-cell table:style-name="表格64.A5" office:value-type="string">
            <text:p text:style-name="P15"><text:span text:style-name="T27">手動設定路由器</text:span></text:p>
          </table:table-cell>
          <table:table-cell table:style-name="表格64.A5" office:value-type="string">
            <text:p text:style-name="P15"><text:span text:style-name="T27">架設網頁／遊戲伺服器</text:span></text:p>
          </table:table-cell>
          <table:table-cell table:style-name="表格64.A5" office:value-type="string">
            <text:p text:style-name="P15"><text:span text:style-name="T27">需要手動維護</text:span></text:p>
          </table:table-cell>
        </table:table-row>
        <table:table-row table:style-name="表格64.1">
          <table:table-cell table:style-name="表格64.A6" office:value-type="string">
            <text:p text:style-name="P15"><text:span text:style-name="T27">UPnP</text:span></text:p>
          </table:table-cell>
          <table:table-cell table:style-name="表格64.A6" office:value-type="string">
            <text:p text:style-name="P15"><text:span text:style-name="T27">應用程式自動設定</text:span></text:p>
          </table:table-cell>
          <table:table-cell table:style-name="表格64.A6" office:value-type="string">
            <text:p text:style-name="P15"><text:span text:style-name="T27">一般遊戲、視訊軟體</text:span></text:p>
          </table:table-cell>
          <table:table-cell table:style-name="表格64.A6" office:value-type="string">
            <text:p text:style-name="P15"><text:span text:style-name="T27">惡意程式可濫用</text:span></text:p>
          </table:table-cell>
        </table:table-row>
        <table:table-row table:style-name="表格64.1">
          <table:table-cell table:style-name="表格64.A5" office:value-type="string">
            <text:p text:style-name="P15"><text:span text:style-name="T27">STUN</text:span></text:p>
          </table:table-cell>
          <table:table-cell table:style-name="表格64.A5" office:value-type="string">
            <text:p text:style-name="P15"><text:span text:style-name="T27">無需路由器設定</text:span></text:p>
          </table:table-cell>
          <table:table-cell table:style-name="表格64.A5" office:value-type="string">
            <text:p text:style-name="P15"><text:span text:style-name="T27">WebRTC、P2P 通話</text:span></text:p>
          </table:table-cell>
          <table:table-cell table:style-name="表格64.A5" office:value-type="string">
            <text:p text:style-name="P15"><text:span text:style-name="T27">Symmetric NAT 會失敗</text:span></text:p>
          </table:table-cell>
        </table:table-row>
      </table:table>
      <text:h text:style-name="P2" text:outline-level="2"><text:span text:style-name="T4">四、完整上網流程（ARP + NAT 合體）</text:span>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8"><text:span text:style-name="T33">🎯 <text:s/></text:span><text:span text:style-name="T49">最重要的核心觀念（先記住）</text:span></text:p>
            <text:p text:style-name="P19"><text:span text:style-name="T50">IP 位址＝</text:span><text:span text:style-name="T28">決定封包的最終目的地（整條路的終點），像信封上的收件地址。</text:span></text:p>
            <text:p text:style-name="P20"><text:span text:style-name="T50">MAC 位址＝</text:span><text:span text:style-name="T28">決定「下一站」要交給哪台機器，像快遞員每次只看下一站。</text:span></text:p>
            <text:p text:style-name="P20"><text:span text:style-name="T43">關鍵理解：</text:span><text:span text:style-name="T28">封包在傳送途中，IP 不變（始終是 Google 的 IP），但 MAC 每一跳都會更換。</text:span></text:p>
          </table:table-cell>
        </table:table-row>
      </table:table>
      <text:p text:style-name="P24"><text:span text:style-name="T20">場景：你電腦 192.168.1.2／路由器內網 IP 192.168.1.1／路由器公網 IP 220.x.x.x／目標 google.com。</text:span>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13"><text:span text:style-name="T25">步驟</text:span></text:p>
            </table:table-cell>
            <table:table-cell table:style-name="表格66.A1" office:value-type="string">
              <text:p text:style-name="P13"><text:span text:style-name="T25">動作</text:span></text:p>
            </table:table-cell>
            <table:table-cell table:style-name="表格66.A1" office:value-type="string">
              <text:p text:style-name="P13"><text:span text:style-name="T25">使用技術</text:span></text:p>
            </table:table-cell>
            <table:table-cell table:style-name="表格66.A1" office:value-type="string">
              <text:p text:style-name="P13"><text:span text:style-name="T25">關鍵重點</text:span>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15"><text:span text:style-name="T31">① DNS</text:span></text:p>
          </table:table-cell>
          <table:table-cell table:style-name="表格66.A2" office:value-type="string">
            <text:p text:style-name="P15"><text:span text:style-name="T31">google.com → 142.250.xxx.xxx</text:span></text:p>
          </table:table-cell>
          <table:table-cell table:style-name="表格66.A2" office:value-type="string">
            <text:p text:style-name="P15"><text:span text:style-name="T31">DNS</text:span></text:p>
          </table:table-cell>
          <table:table-cell table:style-name="表格66.A2" office:value-type="string">
            <text:p text:style-name="P15"><text:span text:style-name="T31">網路只認 IP，不認名字</text:span></text:p>
          </table:table-cell>
        </table:table-row>
        <table:table-row table:style-name="表格66.1">
          <table:table-cell table:style-name="表格66.A3" office:value-type="string">
            <text:p text:style-name="P15"><text:span text:style-name="T31">② ARP</text:span></text:p>
          </table:table-cell>
          <table:table-cell table:style-name="表格66.A3" office:value-type="string">
            <text:p text:style-name="P15"><text:span text:style-name="T31">找路由器（192.168.1.1）的 MAC</text:span></text:p>
          </table:table-cell>
          <table:table-cell table:style-name="表格66.A3" office:value-type="string">
            <text:p text:style-name="P15"><text:span text:style-name="T31">ARP</text:span></text:p>
          </table:table-cell>
          <table:table-cell table:style-name="表格66.A3" office:value-type="string">
            <text:p text:style-name="P15"><text:span text:style-name="T31">找的是「路由器」，不是 Google！</text:span></text:p>
          </table:table-cell>
        </table:table-row>
        <table:table-row table:style-name="表格66.1">
          <table:table-cell table:style-name="表格66.A2" office:value-type="string">
            <text:p text:style-name="P15"><text:span text:style-name="T31">③ 送封包</text:span></text:p>
          </table:table-cell>
          <table:table-cell table:style-name="表格66.A2" office:value-type="string">
            <text:p text:style-name="P15"><text:span text:style-name="T31">IP=Google；MAC=路由器</text:span></text:p>
          </table:table-cell>
          <table:table-cell table:style-name="表格66.A2" office:value-type="string">
            <text:p text:style-name="P15"><text:span text:style-name="T31">L2 傳輸</text:span></text:p>
          </table:table-cell>
          <table:table-cell table:style-name="表格66.A2" office:value-type="string">
            <text:p text:style-name="P15"><text:span text:style-name="T31">IP=終點；MAC=下一站</text:span></text:p>
          </table:table-cell>
        </table:table-row>
        <table:table-row table:style-name="表格66.1">
          <table:table-cell table:style-name="表格66.A3" office:value-type="string">
            <text:p text:style-name="P15"><text:span text:style-name="T31">④ NAT 去程</text:span></text:p>
          </table:table-cell>
          <table:table-cell table:style-name="表格66.A3" office:value-type="string">
            <text:p text:style-name="P15"><text:span text:style-name="T31">192.168.1.2 → 220.x.x.x</text:span></text:p>
          </table:table-cell>
          <table:table-cell table:style-name="表格66.A3" office:value-type="string">
            <text:p text:style-name="P15"><text:span text:style-name="T31">NAT</text:span></text:p>
          </table:table-cell>
          <table:table-cell table:style-name="表格66.A3" office:value-type="string">
            <text:p text:style-name="P15"><text:span text:style-name="T31">換身份才能上 Internet</text:span></text:p>
          </table:table-cell>
        </table:table-row>
        <table:table-row table:style-name="表格66.1">
          <table:table-cell table:style-name="表格66.A2" office:value-type="string">
            <text:p text:style-name="P15"><text:span text:style-name="T31">⑤ 傳到 </text:span><text:soft-page-break/><text:span text:style-name="T31">Google</text:span></text:p>
          </table:table-cell>
          <table:table-cell table:style-name="表格66.A2" office:value-type="string">
            <text:p text:style-name="P15"><text:span text:style-name="T31">封包抵達目的地</text:span></text:p>
          </table:table-cell>
          <table:table-cell table:style-name="表格66.A2" office:value-type="string">
            <text:p text:style-name="P15"><text:span text:style-name="T31">Internet</text:span></text:p>
          </table:table-cell>
          <table:table-cell table:style-name="表格66.A2" office:value-type="string">
            <text:p text:style-name="P15"><text:span text:style-name="T31">Google 只看到公網 IP</text:span></text:p>
          </table:table-cell>
        </table:table-row>
        <table:table-row table:style-name="表格66.1">
          <table:table-cell table:style-name="表格66.A3" office:value-type="string">
            <text:p text:style-name="P15"><text:span text:style-name="T31">⑥ Google 回應</text:span></text:p>
          </table:table-cell>
          <table:table-cell table:style-name="表格66.A3" office:value-type="string">
            <text:p text:style-name="P15"><text:span text:style-name="T31">回傳給 220.x.x.x</text:span></text:p>
          </table:table-cell>
          <table:table-cell table:style-name="表格66.A3" office:value-type="string">
            <text:p text:style-name="P15"><text:span text:style-name="T31">Internet</text:span></text:p>
          </table:table-cell>
          <table:table-cell table:style-name="表格66.A3" office:value-type="string">
            <text:p text:style-name="P15"><text:span text:style-name="T31">路由器收到回應</text:span></text:p>
          </table:table-cell>
        </table:table-row>
        <table:table-row table:style-name="表格66.1">
          <table:table-cell table:style-name="表格66.A2" office:value-type="string">
            <text:p text:style-name="P15"><text:span text:style-name="T31">⑦ NAT 回程</text:span></text:p>
          </table:table-cell>
          <table:table-cell table:style-name="表格66.A2" office:value-type="string">
            <text:p text:style-name="P15"><text:span text:style-name="T31">220.x.x.x → 192.168.1.2</text:span></text:p>
          </table:table-cell>
          <table:table-cell table:style-name="表格66.A2" office:value-type="string">
            <text:p text:style-name="P15"><text:span text:style-name="T31">NAT</text:span></text:p>
          </table:table-cell>
          <table:table-cell table:style-name="表格66.A2" office:value-type="string">
            <text:p text:style-name="P15"><text:span text:style-name="T31">查記錄，換回真正目標</text:span></text:p>
          </table:table-cell>
        </table:table-row>
        <table:table-row table:style-name="表格66.1">
          <table:table-cell table:style-name="表格66.A3" office:value-type="string">
            <text:p text:style-name="P15"><text:span text:style-name="T31">⑧ 收到網頁</text:span></text:p>
          </table:table-cell>
          <table:table-cell table:style-name="表格66.A3" office:value-type="string">
            <text:p text:style-name="P15"><text:span text:style-name="T31">瀏覽器顯示頁面</text:span></text:p>
          </table:table-cell>
          <table:table-cell table:style-name="表格66.A3" office:value-type="string">
            <text:p text:style-name="P15"><text:span text:style-name="T31">—</text:span></text:p>
          </table:table-cell>
          <table:table-cell table:style-name="表格66.A3" office:value-type="string">
            <text:p text:style-name="P15"><text:span text:style-name="T31">一次完整通信結束</text:span>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8"><text:span text:style-name="T33">💣 <text:s/></text:span><text:span text:style-name="T39">三個最容易搞錯的地方（考試地雷）</text:span></text:p>
            <text:p text:style-name="P19"><text:span text:style-name="T43">✗ 以為 ARP 是找 Google 的 MAC　→　</text:span><text:span text:style-name="T28">✓ ARP 找的是「路由器」的 MAC！因為 ARP 只能在同一個 LAN 內使用。</text:span></text:p>
            <text:p text:style-name="P20"><text:span text:style-name="T43">✗ 以為封包直接送到 Google　→　</text:span><text:span text:style-name="T28">✓ 封包先送給路由器，路由器再轉到 Internet。</text:span></text:p>
            <text:p text:style-name="P20"><text:span text:style-name="T43">✗ 以為 IP 在傳輸過程中一直不變　→　</text:span><text:span text:style-name="T28">✓ NAT 會在去程改掉來源 IP，回程再改回去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8"><text:span text:style-name="T33">📝 <text:s/></text:span><text:span text:style-name="T45">考試標準答案（直接背）</text:span></text:p>
            <text:p text:style-name="P19"><text:span text:style-name="T28">使用者輸入網址後，先透過 DNS 將網域名稱解析為 IP；接著主機利用 ARP 取得路由器（預設閘道）的 MAC，將封包傳送至路由器；路由器透過 NAT 將私有 IP 轉換為公網 IP 後送往 Internet；目的主機回應後，路由器再透過 NAT 將封包轉回原內部主機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pan text:style-name="T4">五、ARP vs NAT 一眼看差異</text:span>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13"/>
            </table:table-cell>
            <table:table-cell table:style-name="表格67.A1" office:value-type="string">
              <text:p text:style-name="P13"><text:span text:style-name="T22">ARP</text:span></text:p>
            </table:table-cell>
            <table:table-cell table:style-name="表格67.A1" office:value-type="string">
              <text:p text:style-name="P13"><text:span text:style-name="T22">NAT</text:span>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15"><text:span text:style-name="T27">目的</text:span></text:p>
          </table:table-cell>
          <table:table-cell table:style-name="表格67.A2" office:value-type="string">
            <text:p text:style-name="P15"><text:span text:style-name="T27">用 IP 找 MAC</text:span></text:p>
          </table:table-cell>
          <table:table-cell table:style-name="表格67.A2" office:value-type="string">
            <text:p text:style-name="P15"><text:span text:style-name="T27">私有 IP 轉成公網 IP</text:span></text:p>
          </table:table-cell>
        </table:table-row>
        <table:table-row table:style-name="表格67.1">
          <table:table-cell table:style-name="表格67.A3" office:value-type="string">
            <text:p text:style-name="P15"><text:span text:style-name="T27">使用範圍</text:span></text:p>
          </table:table-cell>
          <table:table-cell table:style-name="表格67.A3" office:value-type="string">
            <text:p text:style-name="P15"><text:span text:style-name="T27">區域網路（LAN）內</text:span></text:p>
          </table:table-cell>
          <table:table-cell table:style-name="表格67.A3" office:value-type="string">
            <text:p text:style-name="P15"><text:span text:style-name="T27">內網與 Internet 之間</text:span></text:p>
          </table:table-cell>
        </table:table-row>
        <table:table-row table:style-name="表格67.1">
          <table:table-cell table:style-name="表格67.A2" office:value-type="string">
            <text:p text:style-name="P15"><text:span text:style-name="T27">運作層級</text:span></text:p>
          </table:table-cell>
          <table:table-cell table:style-name="表格67.A2" office:value-type="string">
            <text:p text:style-name="P15"><text:span text:style-name="T27">L2 / L3 交界</text:span></text:p>
          </table:table-cell>
          <table:table-cell table:style-name="表格67.A2" office:value-type="string">
            <text:p text:style-name="P15"><text:span text:style-name="T27">L3（網路層）</text:span></text:p>
          </table:table-cell>
        </table:table-row>
        <table:table-row table:style-name="表格67.1">
          <table:table-cell table:style-name="表格67.A3" office:value-type="string">
            <text:p text:style-name="P15"><text:span text:style-name="T27">誰執行</text:span></text:p>
          </table:table-cell>
          <table:table-cell table:style-name="表格67.A3" office:value-type="string">
            <text:p text:style-name="P15"><text:span text:style-name="T27">端點裝置（電腦）</text:span></text:p>
          </table:table-cell>
          <table:table-cell table:style-name="表格67.A3" office:value-type="string">
            <text:p text:style-name="P15"><text:span text:style-name="T27">路由器</text:span></text:p>
          </table:table-cell>
        </table:table-row>
        <table:table-row table:style-name="表格67.1">
          <table:table-cell table:style-name="表格67.A2" office:value-type="string">
            <text:p text:style-name="P15"><text:span text:style-name="T27">主要用途</text:span></text:p>
          </table:table-cell>
          <table:table-cell table:style-name="表格67.A2" office:value-type="string">
            <text:p text:style-name="P15"><text:span text:style-name="T27">在區網內傳送封包</text:span></text:p>
          </table:table-cell>
          <table:table-cell table:style-name="表格67.A2" office:value-type="string">
            <text:p text:style-name="P15"><text:span text:style-name="T27">讓內部主機能夠上網</text:span></text:p>
          </table:table-cell>
        </table:table-row>
      </table:table>
      <text:h text:style-name="P1" text:outline-level="1"><text:span text:style-name="T23">第 五 篇　TCP 傳輸控制深入：握手 · SYN Flood · 視窗 · 擁塞控制</text:span>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8"><text:span text:style-name="T33">🚦 <text:s/></text:span><text:span text:style-name="T10">本篇重點</text:span></text:p>
            <text:p text:style-name="P19"><text:span text:style-name="T28">網路的本質是把資料從 A 電腦送到 B 電腦，但中間有四個麻煩，TCP 各自有對策。</text:span></text:p>
          </table:table-cell>
        </table:table-row>
      </table:table>
      <text:h text:style-name="P2" text:outline-level="2"><text:span text:style-name="T4">一、網路的四個麻煩，TCP 如何解決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13"><text:span text:style-name="T22">問題</text:span></text:p>
            </table:table-cell>
            <table:table-cell table:style-name="表格69.A1" office:value-type="string">
              <text:p text:style-name="P13"><text:span text:style-name="T22">說明</text:span></text:p>
            </table:table-cell>
            <table:table-cell table:style-name="表格69.A1" office:value-type="string">
              <text:p text:style-name="P13"><text:span text:style-name="T22">TCP 如何解決</text:span>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15"><text:span text:style-name="T27">資料可能丟失</text:span></text:p>
          </table:table-cell>
          <table:table-cell table:style-name="表格69.A2" office:value-type="string">
            <text:p text:style-name="P15"><text:span text:style-name="T27">封包在網路中消失</text:span></text:p>
          </table:table-cell>
          <table:table-cell table:style-name="表格69.A2" office:value-type="string">
            <text:p text:style-name="P15"><text:span text:style-name="T27">重傳機制（Retransmission）</text:span></text:p>
          </table:table-cell>
        </table:table-row>
        <table:table-row table:style-name="表格69.1">
          <table:table-cell table:style-name="表格69.A3" office:value-type="string">
            <text:p text:style-name="P15"><text:span text:style-name="T27">順序可能亂掉</text:span></text:p>
          </table:table-cell>
          <table:table-cell table:style-name="表格69.A3" office:value-type="string">
            <text:p text:style-name="P15"><text:span text:style-name="T27">封包走不同路徑先後到達</text:span></text:p>
          </table:table-cell>
          <table:table-cell table:style-name="表格69.A3" office:value-type="string">
            <text:p text:style-name="P15"><text:span text:style-name="T27">序號機制（Sequence Number）</text:span></text:p>
          </table:table-cell>
        </table:table-row>
        <table:table-row table:style-name="表格69.1">
          <table:table-cell table:style-name="表格69.A2" office:value-type="string">
            <text:p text:style-name="P15"><text:span text:style-name="T27">對方來不及收</text:span></text:p>
          </table:table-cell>
          <table:table-cell table:style-name="表格69.A2" office:value-type="string">
            <text:p text:style-name="P15"><text:span text:style-name="T27">接收端 buffer 可能爆掉</text:span></text:p>
          </table:table-cell>
          <table:table-cell table:style-name="表格69.A2" office:value-type="string">
            <text:p text:style-name="P15"><text:span text:style-name="T27">流量控制（Flow Control / rwnd）</text:span></text:p>
          </table:table-cell>
        </table:table-row>
        <table:table-row table:style-name="表格69.1">
          <table:table-cell table:style-name="表格69.A3" office:value-type="string">
            <text:p text:style-name="P15"><text:span text:style-name="T27">網路可能塞車</text:span></text:p>
          </table:table-cell>
          <table:table-cell table:style-name="表格69.A3" office:value-type="string">
            <text:p text:style-name="P15"><text:span text:style-name="T27">路由器排隊太長</text:span></text:p>
          </table:table-cell>
          <table:table-cell table:style-name="表格69.A3" office:value-type="string">
            <text:p text:style-name="P15"><text:span text:style-name="T27">擁塞控制（Congestion Control / cwnd）</text:span></text:p>
          </table:table-cell>
        </table:table-row>
      </table:table>
      <text:h text:style-name="P2" text:outline-level="2"><text:span text:style-name="T4">二、TCP vs UDP：可靠還是快速</text:span>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13"><text:span text:style-name="T22">特性</text:span></text:p>
            </table:table-cell>
            <table:table-cell table:style-name="表格70.A1" office:value-type="string">
              <text:p text:style-name="P13"><text:span text:style-name="T22">TCP（可靠模式）</text:span></text:p>
            </table:table-cell>
            <table:table-cell table:style-name="表格70.A1" office:value-type="string">
              <text:p text:style-name="P13"><text:span text:style-name="T22">UDP（快速模式）</text:span>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15"><text:span text:style-name="T27">連線方式</text:span></text:p>
          </table:table-cell>
          <table:table-cell table:style-name="表格70.A2" office:value-type="string">
            <text:p text:style-name="P15"><text:span text:style-name="T27">需要先建立連線</text:span></text:p>
          </table:table-cell>
          <table:table-cell table:style-name="表格70.A2" office:value-type="string">
            <text:p text:style-name="P15"><text:span text:style-name="T27">無連線，直接送</text:span></text:p>
          </table:table-cell>
        </table:table-row>
        <table:table-row table:style-name="表格70.1">
          <table:table-cell table:style-name="表格70.A3" office:value-type="string">
            <text:p text:style-name="P15"><text:span text:style-name="T27">可靠性</text:span></text:p>
          </table:table-cell>
          <table:table-cell table:style-name="表格70.A3" office:value-type="string">
            <text:p text:style-name="P15"><text:span text:style-name="T27">保證送達（會重傳）</text:span></text:p>
          </table:table-cell>
          <table:table-cell table:style-name="表格70.A3" office:value-type="string">
            <text:p text:style-name="P15"><text:span text:style-name="T27">不保證送達</text:span></text:p>
          </table:table-cell>
        </table:table-row>
        <table:table-row table:style-name="表格70.1">
          <table:table-cell table:style-name="表格70.A2" office:value-type="string">
            <text:p text:style-name="P15"><text:span text:style-name="T27">順序</text:span></text:p>
          </table:table-cell>
          <table:table-cell table:style-name="表格70.A2" office:value-type="string">
            <text:p text:style-name="P15"><text:span text:style-name="T27">保證順序正確</text:span></text:p>
          </table:table-cell>
          <table:table-cell table:style-name="表格70.A2" office:value-type="string">
            <text:p text:style-name="P15"><text:span text:style-name="T27">不保證順序</text:span></text:p>
          </table:table-cell>
        </table:table-row>
        <table:table-row table:style-name="表格70.1">
          <table:table-cell table:style-name="表格70.A3" office:value-type="string">
            <text:p text:style-name="P15"><text:span text:style-name="T27">速度</text:span></text:p>
          </table:table-cell>
          <table:table-cell table:style-name="表格70.A3" office:value-type="string">
            <text:p text:style-name="P15"><text:span text:style-name="T27">較慢（有控制機制）</text:span></text:p>
          </table:table-cell>
          <table:table-cell table:style-name="表格70.A3" office:value-type="string">
            <text:p text:style-name="P15"><text:span text:style-name="T27">較快（無額外開銷）</text:span></text:p>
          </table:table-cell>
        </table:table-row>
        <table:table-row table:style-name="表格70.1">
          <table:table-cell table:style-name="表格70.A2" office:value-type="string">
            <text:p text:style-name="P15"><text:span text:style-name="T27">適合場景</text:span></text:p>
          </table:table-cell>
          <table:table-cell table:style-name="表格70.A2" office:value-type="string">
            <text:p text:style-name="P15"><text:span text:style-name="T27">網頁、檔案傳輸、Email</text:span></text:p>
          </table:table-cell>
          <table:table-cell table:style-name="表格70.A2" office:value-type="string">
            <text:p text:style-name="P15"><text:span text:style-name="T27">直播、遊戲、DNS 查詢</text:span></text:p>
          </table:table-cell>
        </table:table-row>
        <table:table-row table:style-name="表格70.1">
          <table:table-cell table:style-name="表格70.A3" office:value-type="string">
            <text:p text:style-name="P15"><text:span text:style-name="T27">比喻</text:span></text:p>
          </table:table-cell>
          <table:table-cell table:style-name="表格70.A3" office:value-type="string">
            <text:p text:style-name="P15"><text:span text:style-name="T27">專業物流（簽收確認）</text:span></text:p>
          </table:table-cell>
          <table:table-cell table:style-name="表格70.A3" office:value-type="string">
            <text:p text:style-name="P15"><text:span text:style-name="T27">亂丟紙飛機</text:span></text:p>
          </table:table-cell>
        </table:table-row>
      </table:table>
      <text:h text:style-name="P2" text:outline-level="2"><text:span text:style-name="T4">三、建立連線：三次握手（Three-way Handshake）</text:span>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8"><text:span text:style-name="T33">🤝 <text:s/></text:span><text:span text:style-name="T10">握手流程</text:span></text:p>
            <text:p text:style-name="P19"><text:span text:style-name="T12">① Client → Server：SYN　</text:span><text:span text:style-name="T28">「我可以傳資料給你嗎？我準備好了。」（Synchronize 同步請求）</text:span></text:p>
            <text:p text:style-name="P20"><text:span text:style-name="T12">② Server → Client：SYN + ACK　</text:span><text:span text:style-name="T28">「可以！我收到你的請求了，我也準備好了。」（確認＋同步）</text:span></text:p>
            <text:p text:style-name="P20"><text:span text:style-name="T12">③ Client → Server：ACK　</text:span><text:span text:style-name="T28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8"><text:span text:style-name="T33">🎯 <text:s/></text:span><text:span text:style-name="T49">三次握手真正目的（考試必考）</text:span></text:p>
            <text:p text:style-name="P19"><text:span text:style-name="T28">確認雙向都能傳資料（Client → Server 和 Server → Client 各自驗證）。</text:span></text:p>
            <text:p text:style-name="P20"><text:span text:style-name="T28">避免「舊封包誤觸發新連線」：若少一次確認，延遲的舊 SYN 封包可能讓 Server 誤以為要建立新連線。</text:span></text:p>
          </table:table-cell>
        </table:table-row>
      </table:table>
      <text:h text:style-name="P2" text:outline-level="2"><text:span text:style-name="T4">四、攻擊：SYN Flood</text:span></text:h>
      <text:p text:style-name="P24"><text:span text:style-name="T28">攻擊原理：攻擊者大量發送 SYN 封包，但故意不完成第三次握手（不回 ACK）。</text:span>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12"><text:span text:style-name="T22">步驟</text:span></text:p>
            </table:table-cell>
            <table:table-cell table:style-name="表格72.A1" office:value-type="string">
              <text:p text:style-name="P12"><text:span text:style-name="T22">發生什麼</text:span>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15"><text:span text:style-name="T27">1</text:span></text:p>
          </table:table-cell>
          <table:table-cell table:style-name="表格72.A2" office:value-type="string">
            <text:p text:style-name="P15"><text:span text:style-name="T27">攻擊者送出大量 SYN，每個都假冒不同來源 IP</text:span></text:p>
          </table:table-cell>
        </table:table-row>
        <text:soft-page-break/>
        <table:table-row table:style-name="表格72.1">
          <table:table-cell table:style-name="表格72.A3" office:value-type="string">
            <text:p text:style-name="P15"><text:span text:style-name="T27">2</text:span></text:p>
          </table:table-cell>
          <table:table-cell table:style-name="表格72.A3" office:value-type="string">
            <text:p text:style-name="P15"><text:span text:style-name="T27">Server 建立「半連線（Half-open Connection）」，每個都佔記憶體等待 ACK</text:span></text:p>
          </table:table-cell>
        </table:table-row>
        <table:table-row table:style-name="表格72.1">
          <table:table-cell table:style-name="表格72.A2" office:value-type="string">
            <text:p text:style-name="P15"><text:span text:style-name="T27">3</text:span></text:p>
          </table:table-cell>
          <table:table-cell table:style-name="表格72.A2" office:value-type="string">
            <text:p text:style-name="P15"><text:span text:style-name="T27">攻擊者永遠不回 ACK，Server 的資源被半連線耗光</text:span></text:p>
          </table:table-cell>
        </table:table-row>
        <table:table-row table:style-name="表格72.1">
          <table:table-cell table:style-name="表格72.A3" office:value-type="string">
            <text:p text:style-name="P15"><text:span text:style-name="T27">4</text:span></text:p>
          </table:table-cell>
          <table:table-cell table:style-name="表格72.A3" office:value-type="string">
            <text:p text:style-name="P15"><text:span text:style-name="T27">正常用戶連線失敗，Server 沒有資源再接受新連線</text:span>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8"><text:span text:style-name="T33">⚠️ <text:s/></text:span><text:span text:style-name="T39">本質</text:span></text:p>
            <text:p text:style-name="P19"><text:span text:style-name="T28">這是一種 DoS（拒絕服務）攻擊，利用 TCP 三次握手機制的不對稱性。</text:span></text:p>
          </table:table-cell>
          <table:covered-table-cell/>
        </table:table-row>
      </table:table>
      <text:h text:style-name="P2" text:outline-level="2"><text:span text:style-name="T4">五、傳送速度的兩個限制：rwnd 與 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12"><text:span text:style-name="T22">rwnd（接收視窗）</text:span>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12"><text:span text:style-name="T22">cwnd（擁塞視窗）</text:span>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15"><text:span text:style-name="T27">接收端的限制。對方 buffer（暫存區）還剩多少空間，就最多能收多少資料。由接收端告知發送端。</text:span></text:p>
          </table:table-cell>
          <table:covered-table-cell/>
          <table:covered-table-cell/>
          <table:table-cell table:style-name="表格73.A2" table:number-columns-spanned="3" office:value-type="string">
            <text:p text:style-name="P15"><text:span text:style-name="T27">網路的限制。發送端根據網路狀況自行估計，目前網路最多能承受多少資料量。由發送端自行維護。</text:span>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9"><text:span text:style-name="T50">實際傳送量 ＝ min(rwnd, cwnd)　</text:span><text:span text:style-name="T28">取兩者最小值。對方吃不下就看 rwnd；網路塞就看 cwnd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12"><text:span text:style-name="T22">情境</text:span></text:p>
          </table:table-cell>
          <table:table-cell table:style-name="表格73.A1" office:value-type="string">
            <text:p text:style-name="P12"><text:span text:style-name="T22">cwnd</text:span></text:p>
          </table:table-cell>
          <table:table-cell table:style-name="表格73.A1" table:number-columns-spanned="2" office:value-type="string">
            <text:p text:style-name="P12"><text:span text:style-name="T22">rwnd</text:span></text:p>
          </table:table-cell>
          <table:covered-table-cell/>
          <table:table-cell table:style-name="表格73.A1" office:value-type="string">
            <text:p text:style-name="P12"><text:span text:style-name="T22">實際傳送量</text:span></text:p>
          </table:table-cell>
          <table:table-cell table:style-name="表格73.A1" office:value-type="string">
            <text:p text:style-name="P12"><text:span text:style-name="T22">瓶頸原因</text:span></text:p>
          </table:table-cell>
        </table:table-row>
        <table:table-row table:style-name="表格73.1">
          <table:table-cell table:style-name="表格73.A2" office:value-type="string">
            <text:p text:style-name="P15"><text:span text:style-name="T27">對方 buffer 快滿了</text:span></text:p>
          </table:table-cell>
          <table:table-cell table:style-name="表格73.A2" office:value-type="string">
            <text:p text:style-name="P15"><text:span text:style-name="T27">10</text:span></text:p>
          </table:table-cell>
          <table:table-cell table:style-name="表格73.A2" table:number-columns-spanned="2" office:value-type="string">
            <text:p text:style-name="P15"><text:span text:style-name="T27">3</text:span></text:p>
          </table:table-cell>
          <table:covered-table-cell/>
          <table:table-cell table:style-name="表格73.A2" office:value-type="string">
            <text:p text:style-name="P15"><text:span text:style-name="T27">3</text:span></text:p>
          </table:table-cell>
          <table:table-cell table:style-name="表格73.A2" office:value-type="string">
            <text:p text:style-name="P15"><text:span text:style-name="T27">接收端限制（rwnd）</text:span></text:p>
          </table:table-cell>
        </table:table-row>
        <table:table-row table:style-name="表格73.1">
          <table:table-cell table:style-name="表格73.A6" office:value-type="string">
            <text:p text:style-name="P15"><text:span text:style-name="T27">網路很塞</text:span></text:p>
          </table:table-cell>
          <table:table-cell table:style-name="表格73.A6" office:value-type="string">
            <text:p text:style-name="P15"><text:span text:style-name="T27">2</text:span></text:p>
          </table:table-cell>
          <table:table-cell table:style-name="表格73.A6" table:number-columns-spanned="2" office:value-type="string">
            <text:p text:style-name="P15"><text:span text:style-name="T27">10</text:span></text:p>
          </table:table-cell>
          <table:covered-table-cell/>
          <table:table-cell table:style-name="表格73.A6" office:value-type="string">
            <text:p text:style-name="P15"><text:span text:style-name="T27">2</text:span></text:p>
          </table:table-cell>
          <table:table-cell table:style-name="表格73.A6" office:value-type="string">
            <text:p text:style-name="P15"><text:span text:style-name="T27">網路限制（cwnd）</text:span></text:p>
          </table:table-cell>
        </table:table-row>
        <table:table-row table:style-name="表格73.1">
          <table:table-cell table:style-name="表格73.A2" office:value-type="string">
            <text:p text:style-name="P15"><text:span text:style-name="T27">兩者相近</text:span></text:p>
          </table:table-cell>
          <table:table-cell table:style-name="表格73.A2" office:value-type="string">
            <text:p text:style-name="P15"><text:span text:style-name="T27">5</text:span></text:p>
          </table:table-cell>
          <table:table-cell table:style-name="表格73.A2" table:number-columns-spanned="2" office:value-type="string">
            <text:p text:style-name="P15"><text:span text:style-name="T27">6</text:span></text:p>
          </table:table-cell>
          <table:covered-table-cell/>
          <table:table-cell table:style-name="表格73.A2" office:value-type="string">
            <text:p text:style-name="P15"><text:span text:style-name="T27">5</text:span></text:p>
          </table:table-cell>
          <table:table-cell table:style-name="表格73.A2" office:value-type="string">
            <text:p text:style-name="P15"><text:span text:style-name="T27">網路限制（cwnd）</text:span></text:p>
          </table:table-cell>
        </table:table-row>
      </table:table>
      <text:h text:style-name="P2" text:outline-level="2"><text:span text:style-name="T4">六、滑動視窗（Sliding Window）</text:span></text:h>
      <text:p text:style-name="P24"><text:span text:style-name="T28">最笨的方法：送 1 個封包 → 等 ACK → 再送 1 個 → 等 ACK，大部分時間在閒置，非常浪費。TCP 的改進：不用等 ACK，先連續送出多個封包讓封包都在網路上飛（in-flight），ACK 再慢慢回來，這就是 pipeline（流水線）傳輸。</text:span>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9"><text:span text:style-name="T43">✗ 常見錯誤：</text:span><text:span text:style-name="T28">視窗 = cwnd（擁塞視窗）。</text:span><text:span text:style-name="T46">✓ 正確：</text:span><text:span text:style-name="T28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13"><text:span text:style-name="T22">時間點</text:span></text:p>
          </table:table-cell>
          <table:table-cell table:style-name="表格74.A2" office:value-type="string">
            <text:p text:style-name="P13"><text:span text:style-name="T22">已確認</text:span></text:p>
          </table:table-cell>
          <table:table-cell table:style-name="表格74.A2" office:value-type="string">
            <text:p text:style-name="P13"><text:span text:style-name="T22">視窗範圍（可送）</text:span></text:p>
          </table:table-cell>
          <table:table-cell table:style-name="表格74.A2" office:value-type="string">
            <text:p text:style-name="P13"><text:span text:style-name="T22">等待中</text:span></text:p>
          </table:table-cell>
        </table:table-row>
        <table:table-row table:style-name="表格74.1">
          <table:table-cell table:style-name="表格74.A3" office:value-type="string">
            <text:p text:style-name="P15"><text:span text:style-name="T27">初始狀態</text:span></text:p>
          </table:table-cell>
          <table:table-cell table:style-name="表格74.A3" office:value-type="string">
            <text:p text:style-name="P15"><text:span text:style-name="T27">無</text:span></text:p>
          </table:table-cell>
          <table:table-cell table:style-name="表格74.A3" office:value-type="string">
            <text:p text:style-name="P15"><text:span text:style-name="T27">封包 1, 2, 3</text:span></text:p>
          </table:table-cell>
          <table:table-cell table:style-name="表格74.A3" office:value-type="string">
            <text:p text:style-name="P15"><text:span text:style-name="T27">4, 5, 6 …</text:span></text:p>
          </table:table-cell>
        </table:table-row>
        <table:table-row table:style-name="表格74.1">
          <table:table-cell table:style-name="表格74.A4" office:value-type="string">
            <text:p text:style-name="P15"><text:span text:style-name="T27">收到 ACK 1</text:span></text:p>
          </table:table-cell>
          <table:table-cell table:style-name="表格74.A4" office:value-type="string">
            <text:p text:style-name="P15"><text:span text:style-name="T27">封包 1</text:span></text:p>
          </table:table-cell>
          <table:table-cell table:style-name="表格74.A4" office:value-type="string">
            <text:p text:style-name="P15"><text:span text:style-name="T27">封包 2, 3, 4</text:span></text:p>
          </table:table-cell>
          <table:table-cell table:style-name="表格74.A4" office:value-type="string">
            <text:p text:style-name="P15"><text:span text:style-name="T27">5, 6 …（視窗滑動了！）</text:span></text:p>
          </table:table-cell>
        </table:table-row>
        <table:table-row table:style-name="表格74.1">
          <table:table-cell table:style-name="表格74.A3" office:value-type="string">
            <text:p text:style-name="P15"><text:span text:style-name="T27">收到 ACK 2</text:span></text:p>
          </table:table-cell>
          <table:table-cell table:style-name="表格74.A3" office:value-type="string">
            <text:p text:style-name="P15"><text:span text:style-name="T27">封包 1, 2</text:span></text:p>
          </table:table-cell>
          <table:table-cell table:style-name="表格74.A3" office:value-type="string">
            <text:p text:style-name="P15"><text:span text:style-name="T27">封包 3, 4, 5</text:span></text:p>
          </table:table-cell>
          <table:table-cell table:style-name="表格74.A3" office:value-type="string">
            <text:p text:style-name="P15"><text:span text:style-name="T27">6, 7 …（繼續往右滑）</text:span></text:p>
          </table:table-cell>
        </table:table-row>
      </table:table>
      <text:p text:style-name="P24"><text:span text:style-name="T20">關鍵理解：視窗大小決定效率（越大越快），ACK 的回傳決定視窗位置（往前滑），兩者合作讓傳輸保持流暢。</text:span></text:p>
      <text:h text:style-name="P2" text:outline-level="2"><text:span text:style-name="T4">七、擁塞控制：怎麼調整速度</text:span></text:h>
      <text:h text:style-name="P3" text:outline-level="3"><text:span text:style-name="T34">▍</text:span><text:span text:style-name="T35"> 階段一：Slow Start（慢啟動）— 指數成長</text:span></text:h>
      <text:p text:style-name="P24"><text:span text:style-name="T28">雖叫「慢」啟動，實際成長非常快。規則：每收到一個 ACK，cwnd 就 +1；送出 N 個封包 → 收回 N 個 ACK → cwnd 增加 N，所以每輪自然翻倍。</text:span>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12"><text:span text:style-name="T22">輪次（RTT）</text:span></text:p>
            </table:table-cell>
            <table:table-cell table:style-name="表格75.A1" office:value-type="string">
              <text:p text:style-name="P12"><text:span text:style-name="T22">cwnd</text:span></text:p>
            </table:table-cell>
            <table:table-cell table:style-name="表格75.A1" office:value-type="string">
              <text:p text:style-name="P12"><text:span text:style-name="T22">送出封包數</text:span></text:p>
            </table:table-cell>
            <table:table-cell table:style-name="表格75.A1" office:value-type="string">
              <text:p text:style-name="P12"><text:span text:style-name="T22">收回 ACK 數</text:span></text:p>
            </table:table-cell>
            <table:table-cell table:style-name="表格75.A1" office:value-type="string">
              <text:p text:style-name="P12"><text:span text:style-name="T22">新 cwnd</text:span>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15"><text:span text:style-name="T27">第 1 輪</text:span></text:p>
          </table:table-cell>
          <table:table-cell table:style-name="表格75.A2" office:value-type="string">
            <text:p text:style-name="P15"><text:span text:style-name="T27">1</text:span></text:p>
          </table:table-cell>
          <table:table-cell table:style-name="表格75.A2" office:value-type="string">
            <text:p text:style-name="P15"><text:span text:style-name="T27">1</text:span></text:p>
          </table:table-cell>
          <table:table-cell table:style-name="表格75.A2" office:value-type="string">
            <text:p text:style-name="P15"><text:span text:style-name="T27">1</text:span></text:p>
          </table:table-cell>
          <table:table-cell table:style-name="表格75.A2" office:value-type="string">
            <text:p text:style-name="P15"><text:span text:style-name="T27">2</text:span>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15"><text:span text:style-name="T27">第 2 輪</text:span></text:p>
          </table:table-cell>
          <table:table-cell table:style-name="表格75.A3" office:value-type="string">
            <text:p text:style-name="P15"><text:span text:style-name="T27">2</text:span></text:p>
          </table:table-cell>
          <table:table-cell table:style-name="表格75.A3" office:value-type="string">
            <text:p text:style-name="P15"><text:span text:style-name="T27">2</text:span></text:p>
          </table:table-cell>
          <table:table-cell table:style-name="表格75.A3" office:value-type="string">
            <text:p text:style-name="P15"><text:span text:style-name="T27">2</text:span></text:p>
          </table:table-cell>
          <table:table-cell table:style-name="表格75.A3" office:value-type="string">
            <text:p text:style-name="P15"><text:span text:style-name="T27">4</text:span></text:p>
          </table:table-cell>
        </table:table-row>
        <table:table-row table:style-name="表格75.1">
          <table:table-cell table:style-name="表格75.A2" office:value-type="string">
            <text:p text:style-name="P15"><text:span text:style-name="T27">第 3 輪</text:span></text:p>
          </table:table-cell>
          <table:table-cell table:style-name="表格75.A2" office:value-type="string">
            <text:p text:style-name="P15"><text:span text:style-name="T27">4</text:span></text:p>
          </table:table-cell>
          <table:table-cell table:style-name="表格75.A2" office:value-type="string">
            <text:p text:style-name="P15"><text:span text:style-name="T27">4</text:span></text:p>
          </table:table-cell>
          <table:table-cell table:style-name="表格75.A2" office:value-type="string">
            <text:p text:style-name="P15"><text:span text:style-name="T27">4</text:span></text:p>
          </table:table-cell>
          <table:table-cell table:style-name="表格75.A2" office:value-type="string">
            <text:p text:style-name="P15"><text:span text:style-name="T27">8</text:span></text:p>
          </table:table-cell>
        </table:table-row>
        <table:table-row table:style-name="表格75.1">
          <table:table-cell table:style-name="表格75.A3" office:value-type="string">
            <text:p text:style-name="P15"><text:span text:style-name="T27">第 4 輪</text:span></text:p>
          </table:table-cell>
          <table:table-cell table:style-name="表格75.A3" office:value-type="string">
            <text:p text:style-name="P15"><text:span text:style-name="T27">8</text:span></text:p>
          </table:table-cell>
          <table:table-cell table:style-name="表格75.A3" office:value-type="string">
            <text:p text:style-name="P15"><text:span text:style-name="T27">8</text:span></text:p>
          </table:table-cell>
          <table:table-cell table:style-name="表格75.A3" office:value-type="string">
            <text:p text:style-name="P15"><text:span text:style-name="T27">8</text:span></text:p>
          </table:table-cell>
          <table:table-cell table:style-name="表格75.A3" office:value-type="string">
            <text:p text:style-name="P15"><text:span text:style-name="T27">16</text:span></text:p>
          </table:table-cell>
        </table:table-row>
      </table:table>
      <text:h text:style-name="P3" text:outline-level="3"><text:span text:style-name="T34">▍</text:span><text:span text:style-name="T35"> 階段二：Congestion Avoidance（擁塞避免）— 線性成長</text:span></text:h>
      <text:p text:style-name="P24"><text:span text:style-name="T28">cwnd 成長到門檻值（ssthresh）後，改為線性成長（每個 RTT 只 +1），避免增長太快讓網路過載。</text:span>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13"/>
            </table:table-cell>
            <table:table-cell table:style-name="表格76.A1" office:value-type="string">
              <text:p text:style-name="P13"><text:span text:style-name="T22">Slow Start</text:span></text:p>
            </table:table-cell>
            <table:table-cell table:style-name="表格76.A1" office:value-type="string">
              <text:p text:style-name="P13"><text:span text:style-name="T22">Congestion Avoidance</text:span>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15"><text:span text:style-name="T27">觸發條件</text:span></text:p>
          </table:table-cell>
          <table:table-cell table:style-name="表格76.A2" office:value-type="string">
            <text:p text:style-name="P15"><text:span text:style-name="T27">cwnd &lt; ssthresh</text:span></text:p>
          </table:table-cell>
          <table:table-cell table:style-name="表格76.A2" office:value-type="string">
            <text:p text:style-name="P15"><text:span text:style-name="T27">cwnd ≥ ssthresh</text:span></text:p>
          </table:table-cell>
        </table:table-row>
        <table:table-row table:style-name="表格76.1">
          <table:table-cell table:style-name="表格76.A3" office:value-type="string">
            <text:p text:style-name="P15"><text:span text:style-name="T27">成長方式</text:span></text:p>
          </table:table-cell>
          <table:table-cell table:style-name="表格76.A3" office:value-type="string">
            <text:p text:style-name="P15"><text:span text:style-name="T27">指數成長（每個 ACK +1）</text:span></text:p>
          </table:table-cell>
          <table:table-cell table:style-name="表格76.A3" office:value-type="string">
            <text:p text:style-name="P15"><text:span text:style-name="T27">線性成長（每個 RTT +1）</text:span></text:p>
          </table:table-cell>
        </table:table-row>
        <table:table-row table:style-name="表格76.1">
          <table:table-cell table:style-name="表格76.A2" office:value-type="string">
            <text:p text:style-name="P15"><text:span text:style-name="T27">特性</text:span></text:p>
          </table:table-cell>
          <table:table-cell table:style-name="表格76.A2" office:value-type="string">
            <text:p text:style-name="P15"><text:span text:style-name="T27">快速試探網路上限</text:span></text:p>
          </table:table-cell>
          <table:table-cell table:style-name="表格76.A2" office:value-type="string">
            <text:p text:style-name="P15"><text:span text:style-name="T27">保守維持穩定傳輸</text:span></text:p>
          </table:table-cell>
        </table:table-row>
      </table:table>
      <text:h text:style-name="P3" text:outline-level="3"><text:span text:style-name="T34">▍</text:span><text:span text:style-name="T35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13"><text:span text:style-name="T25">丟包偵測方式</text:span></text:p>
            </table:table-cell>
            <table:table-cell table:style-name="表格77.A1" office:value-type="string">
              <text:p text:style-name="P13"><text:span text:style-name="T25">說明</text:span></text:p>
            </table:table-cell>
            <table:table-cell table:style-name="表格77.A1" office:value-type="string">
              <text:p text:style-name="P13"><text:span text:style-name="T25">ssthresh</text:span></text:p>
            </table:table-cell>
            <table:table-cell table:style-name="表格77.A1" office:value-type="string">
              <text:p text:style-name="P13"><text:span text:style-name="T25">cwnd</text:span></text:p>
            </table:table-cell>
            <table:table-cell table:style-name="表格77.A1" office:value-type="string">
              <text:p text:style-name="P13"><text:span text:style-name="T25">下一階段</text:span>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15"><text:span text:style-name="T31">Timeout（逾時）</text:span></text:p>
          </table:table-cell>
          <table:table-cell table:style-name="表格77.A2" office:value-type="string">
            <text:p text:style-name="P15"><text:span text:style-name="T31">等太久沒 ACK，網路嚴重擁塞</text:span></text:p>
          </table:table-cell>
          <table:table-cell table:style-name="表格77.A2" office:value-type="string">
            <text:p text:style-name="P15"><text:span text:style-name="T31">= cwnd / 2</text:span></text:p>
          </table:table-cell>
          <table:table-cell table:style-name="表格77.A2" office:value-type="string">
            <text:p text:style-name="P15"><text:span text:style-name="T40">重設為 1</text:span></text:p>
          </table:table-cell>
          <table:table-cell table:style-name="表格77.A2" office:value-type="string">
            <text:p text:style-name="P15"><text:span text:style-name="T31">重新進入 Slow Start</text:span></text:p>
          </table:table-cell>
        </table:table-row>
        <table:table-row table:style-name="表格77.1">
          <table:table-cell table:style-name="表格77.A3" office:value-type="string">
            <text:p text:style-name="P15"><text:span text:style-name="T31">3 個重複 ACK (Fast Retransmit)</text:span></text:p>
          </table:table-cell>
          <table:table-cell table:style-name="表格77.A3" office:value-type="string">
            <text:p text:style-name="P15"><text:span text:style-name="T31">連續收 3 個同樣 ACK，單一封包丟失</text:span></text:p>
          </table:table-cell>
          <table:table-cell table:style-name="表格77.A3" office:value-type="string">
            <text:p text:style-name="P15"><text:span text:style-name="T31">= cwnd / 2</text:span></text:p>
          </table:table-cell>
          <table:table-cell table:style-name="表格77.A3" office:value-type="string">
            <text:p text:style-name="P15"><text:span text:style-name="T5">= ssthresh（直接減半）</text:span></text:p>
          </table:table-cell>
          <table:table-cell table:style-name="表格77.A3" office:value-type="string">
            <text:p text:style-name="P15"><text:span text:style-name="T31">進入 Congestion Avoidance</text:span>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8"><text:span text:style-name="T33">⚠️ <text:s/></text:span><text:span text:style-name="T39">重要區別</text:span></text:p>
            <text:p text:style-name="P19"><text:span text:style-name="T28">Timeout 代表網路嚴重問題，cwnd 重設回 1 從頭來；3 個重複 ACK 只是單一封包遺失，cwnd 直接減半後繼續 Congestion Avoidance，不用從頭重來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3" text:outline-level="3"><text:span text:style-name="T34">▍</text:span><text:span text:style-name="T35"> AIMD（加法增長 / 乘法減少）</text:span></text:h>
      <table:table table:name="表格78" table:style-name="表格78">
        <table:table-column table:style-name="表格78.A"/>
        <table:table-column table:style-name="表格78.B"/>
        <table:table-header-rows>
          <table:table-row table:style-name="表格78.1">
            <table:table-cell table:style-name="表格78.A1" office:value-type="string">
              <text:p text:style-name="P12"><text:span text:style-name="T22">AI：加法增長 Additive Increase</text:span></text:p>
            </table:table-cell>
            <table:table-cell table:style-name="表格78.A1" office:value-type="string">
              <text:p text:style-name="P12"><text:span text:style-name="T22">MD：乘法減少 Multiplicative Decrease</text:span>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15"><text:span text:style-name="T27">沒丟包 → 網路 OK → CA 階段線性增加（每 RTT +1），慢慢加速。</text:span></text:p>
          </table:table-cell>
          <table:table-cell table:style-name="表格78.A2" office:value-type="string">
            <text:p text:style-name="P15"><text:span text:style-name="T27">偵測到丟包 → 網路塞了 → cwnd ×0.5（減半），快速降速避免繼續惡化。</text:span></text:p>
          </table:table-cell>
        </table:table-row>
      </table:table>
      <text:p text:style-name="P24"><text:span text:style-name="T20">AIMD 本質：用 ACK 當回饋，不斷探測網路的「最高速度」——慢慢加速找上限，遇到問題快速減速再重新找，這個循環就是 TCP 傳輸的節奏。</text:span></text:p>
      <text:h text:style-name="P2" text:outline-level="2"><text:span text:style-name="T4">八、把整個 TCP 串起來（完整流程）</text:span>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8"><text:span text:style-name="T33">🔄 <text:s/></text:span><text:span text:style-name="T10">完整流程</text:span></text:p>
            <text:p text:style-name="P19"><text:span text:style-name="T28">① 建立連線：三次握手（SYN → SYN+ACK → ACK）確認雙向通訊正常。</text:span></text:p>
            <text:p text:style-name="P20"><text:span text:style-name="T28">② 開始傳資料 Slow Start：cwnd 從 1 開始，每個 ACK +1，指數成長快速試探上限。</text:span></text:p>
            <text:p text:style-name="P20"><text:span text:style-name="T28">③ 達到門檻切換 CA：cwnd 到 ssthresh 後改每 RTT +1，線性保守維持穩定。（RTT＝來回時間：送出一個封包到收到 ACK 所花的時間）</text:span></text:p>
            <text:p text:style-name="P20"><text:span text:style-name="T28">④ 每輪都考慮兩個限制：實際傳送量 = min(rwnd, cwnd)。</text:span></text:p>
            <text:p text:style-name="P20"><text:span text:style-name="T28">⑤ 視窗持續滑動：每收到一個 ACK 視窗往前移，保持 pipeline 流暢。</text:span></text:p>
            <text:p text:style-name="P20"><text:span text:style-name="T28">⑥ 偵測到丟包快速反應：Timeout → cwnd=1 重回 Slow Start；3 重複 ACK → cwnd 減半續 CA。</text:span></text:p>
            <text:p text:style-name="P20"><text:span text:style-name="T28">⑦ 持續循環調整：送 → 收 ACK → 調整 cwnd → 再送，用 ACK 當回饋不斷自我調節。</text:span></text:p>
          </table:table-cell>
        </table:table-row>
      </table:table>
      <text:h text:style-name="P2" text:outline-level="2"><text:soft-page-break/><text:span text:style-name="T4">九、ARP / NAT / TCP 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13"><text:span text:style-name="T22">步驟</text:span></text:p>
            </table:table-cell>
            <table:table-cell table:style-name="表格80.A1" office:value-type="string">
              <text:p text:style-name="P13"><text:span text:style-name="T22">發生什麼</text:span></text:p>
            </table:table-cell>
            <table:table-cell table:style-name="表格80.A1" office:value-type="string">
              <text:p text:style-name="P13"><text:span text:style-name="T22">用到什麼</text:span>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15"><text:span text:style-name="T27">DNS 解析</text:span></text:p>
          </table:table-cell>
          <table:table-cell table:style-name="表格80.A2" office:value-type="string">
            <text:p text:style-name="P15"><text:span text:style-name="T27">google.com → 142.250.x.x</text:span></text:p>
          </table:table-cell>
          <table:table-cell table:style-name="表格80.A2" office:value-type="string">
            <text:p text:style-name="P15"><text:span text:style-name="T27">DNS</text:span></text:p>
          </table:table-cell>
        </table:table-row>
        <table:table-row table:style-name="表格80.1">
          <table:table-cell table:style-name="表格80.A3" office:value-type="string">
            <text:p text:style-name="P15"><text:span text:style-name="T27">ARP 找路由器</text:span></text:p>
          </table:table-cell>
          <table:table-cell table:style-name="表格80.A3" office:value-type="string">
            <text:p text:style-name="P15"><text:span text:style-name="T27">找路由器的 MAC 位址</text:span></text:p>
          </table:table-cell>
          <table:table-cell table:style-name="表格80.A3" office:value-type="string">
            <text:p text:style-name="P15"><text:span text:style-name="T27">ARP</text:span></text:p>
          </table:table-cell>
        </table:table-row>
        <table:table-row table:style-name="表格80.1">
          <table:table-cell table:style-name="表格80.A2" office:value-type="string">
            <text:p text:style-name="P15"><text:span text:style-name="T27">NAT</text:span></text:p>
          </table:table-cell>
          <table:table-cell table:style-name="表格80.A2" office:value-type="string">
            <text:p text:style-name="P15"><text:span text:style-name="T27">私有 IP 換成公網 IP</text:span></text:p>
          </table:table-cell>
          <table:table-cell table:style-name="表格80.A2" office:value-type="string">
            <text:p text:style-name="P15"><text:span text:style-name="T27">NAT</text:span></text:p>
          </table:table-cell>
        </table:table-row>
        <table:table-row table:style-name="表格80.1">
          <table:table-cell table:style-name="表格80.A3" office:value-type="string">
            <text:p text:style-name="P15"><text:span text:style-name="T27">TCP 三次握手</text:span></text:p>
          </table:table-cell>
          <table:table-cell table:style-name="表格80.A3" office:value-type="string">
            <text:p text:style-name="P15"><text:span text:style-name="T27">與 Google 建立可靠連線</text:span></text:p>
          </table:table-cell>
          <table:table-cell table:style-name="表格80.A3" office:value-type="string">
            <text:p text:style-name="P15"><text:span text:style-name="T27">TCP</text:span></text:p>
          </table:table-cell>
        </table:table-row>
        <table:table-row table:style-name="表格80.1">
          <table:table-cell table:style-name="表格80.A2" office:value-type="string">
            <text:p text:style-name="P15"><text:span text:style-name="T27">傳資料（Slow Start → CA）</text:span></text:p>
          </table:table-cell>
          <table:table-cell table:style-name="表格80.A2" office:value-type="string">
            <text:p text:style-name="P15"><text:span text:style-name="T27">cwnd 慢慢加速，滑動視窗持續傳送</text:span></text:p>
          </table:table-cell>
          <table:table-cell table:style-name="表格80.A2" office:value-type="string">
            <text:p text:style-name="P15"><text:span text:style-name="T27">TCP 擁塞控制</text:span></text:p>
          </table:table-cell>
        </table:table-row>
        <table:table-row table:style-name="表格80.1">
          <table:table-cell table:style-name="表格80.A3" office:value-type="string">
            <text:p text:style-name="P15"><text:span text:style-name="T27">Google 回應</text:span></text:p>
          </table:table-cell>
          <table:table-cell table:style-name="表格80.A3" office:value-type="string">
            <text:p text:style-name="P15"><text:span text:style-name="T27">資料送回你的電腦</text:span></text:p>
          </table:table-cell>
          <table:table-cell table:style-name="表格80.A3" office:value-type="string">
            <text:p text:style-name="P15"><text:span text:style-name="T27">TCP + NAT（回程換 IP）</text:span>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8"><text:span text:style-name="T33">⚡ <text:s/></text:span><text:span text:style-name="T35">層次關係</text:span></text:p>
            <text:p text:style-name="P19"><text:span text:style-name="T28">ARP 在 L2/L3 交界處工作（找 MAC）；NAT 在 L3（換 IP）；TCP 在 L4（控制傳輸）。三者各司其職，合作完成一次上網。</text:span></text:p>
          </table:table-cell>
          <table:covered-table-cell/>
          <table:covered-table-cell/>
        </table:table-row>
      </table:table>
      <text:h text:style-name="P2" text:outline-level="2"><text:span text:style-name="T4">十、本篇一句話總結</text:span>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8"><text:span text:style-name="T33">🧠 <text:s/></text:span><text:span text:style-name="T49">考試直接用</text:span></text:p>
            <text:p text:style-name="P19"><text:span text:style-name="T28">TCP 用三次握手建立連線，用 rwnd（接收端）和 cwnd（網路）雙重限制控制傳送速度，透過 Slow Start 指數試探、Congestion Avoidance 線性增長、丟包後快速降速，持續用 ACK 當回饋調節，確保資料可靠且高效地傳達。</text:span></text:p>
          </table:table-cell>
        </table:table-row>
      </table:table>
      <text:h text:style-name="P1" text:outline-level="1"><text:span text:style-name="T23">第 六 篇　DNS 與 DNSSEC</text:span>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8"><text:span text:style-name="T33">💡 <text:s/></text:span><text:span text:style-name="T10">DNS 是什麼？</text:span></text:p>
            <text:p text:style-name="P19"><text:span text:style-name="T28">DNS 就像「網路電話簿」。人類習慣記名字（google.com），但電腦只認識號碼（IP 位址），DNS 的工作就是幫你查出對應的號碼。全名 Domain Name System，是負責將「網域名稱」轉換為「IP 位址」的分散式系統。</text:span></text:p>
          </table:table-cell>
        </table:table-row>
      </table:table>
      <text:h text:style-name="P2" text:outline-level="2"><text:span text:style-name="T4">一、DNS 資源紀錄類型</text:span>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13"><text:span text:style-name="T22">類型</text:span></text:p>
            </table:table-cell>
            <table:table-cell table:style-name="表格83.A1" office:value-type="string">
              <text:p text:style-name="P13"><text:span text:style-name="T22">全名</text:span></text:p>
            </table:table-cell>
            <table:table-cell table:style-name="表格83.A1" office:value-type="string">
              <text:p text:style-name="P13"><text:span text:style-name="T22">用途</text:span></text:p>
            </table:table-cell>
            <table:table-cell table:style-name="表格83.A1" office:value-type="string">
              <text:p text:style-name="P13"><text:span text:style-name="T22">範例</text:span>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15"><text:span text:style-name="T27">A</text:span></text:p>
          </table:table-cell>
          <table:table-cell table:style-name="表格83.A2" office:value-type="string">
            <text:p text:style-name="P15"><text:span text:style-name="T27">Address Record</text:span></text:p>
          </table:table-cell>
          <table:table-cell table:style-name="表格83.A2" office:value-type="string">
            <text:p text:style-name="P15"><text:span text:style-name="T27">網域名稱 → IPv4 位址</text:span></text:p>
          </table:table-cell>
          <table:table-cell table:style-name="表格83.A2" office:value-type="string">
            <text:p text:style-name="P15"><text:span text:style-name="T27">google.com → 142.250.x.x</text:span></text:p>
          </table:table-cell>
        </table:table-row>
        <table:table-row table:style-name="表格83.1">
          <table:table-cell table:style-name="表格83.A3" office:value-type="string">
            <text:p text:style-name="P15"><text:span text:style-name="T27">NS</text:span></text:p>
          </table:table-cell>
          <table:table-cell table:style-name="表格83.A3" office:value-type="string">
            <text:p text:style-name="P15"><text:span text:style-name="T27">Name Server</text:span></text:p>
          </table:table-cell>
          <table:table-cell table:style-name="表格83.A3" office:value-type="string">
            <text:p text:style-name="P15"><text:span text:style-name="T27">指定管理該網域的 DNS 伺服器</text:span></text:p>
          </table:table-cell>
          <table:table-cell table:style-name="表格83.A3" office:value-type="string">
            <text:p text:style-name="P15"><text:span text:style-name="T27">google.com → ns1.google.com</text:span></text:p>
          </table:table-cell>
        </table:table-row>
        <table:table-row table:style-name="表格83.1">
          <table:table-cell table:style-name="表格83.A2" office:value-type="string">
            <text:p text:style-name="P15"><text:span text:style-name="T27">MX</text:span></text:p>
          </table:table-cell>
          <table:table-cell table:style-name="表格83.A2" office:value-type="string">
            <text:p text:style-name="P15"><text:span text:style-name="T27">Mail Exchange</text:span></text:p>
          </table:table-cell>
          <table:table-cell table:style-name="表格83.A2" office:value-type="string">
            <text:p text:style-name="P15"><text:span text:style-name="T27">指定負責收發郵件的伺服器</text:span></text:p>
          </table:table-cell>
          <table:table-cell table:style-name="表格83.A2" office:value-type="string">
            <text:p text:style-name="P15"><text:span text:style-name="T27">google.com → mail.google.com</text:span></text:p>
          </table:table-cell>
        </table:table-row>
        <table:table-row table:style-name="表格83.1">
          <table:table-cell table:style-name="表格83.A3" office:value-type="string">
            <text:p text:style-name="P15"><text:span text:style-name="T27">CNAME</text:span></text:p>
          </table:table-cell>
          <table:table-cell table:style-name="表格83.A3" office:value-type="string">
            <text:p text:style-name="P15"><text:span text:style-name="T27">Canonical Name</text:span></text:p>
          </table:table-cell>
          <table:table-cell table:style-name="表格83.A3" office:value-type="string">
            <text:p text:style-name="P15"><text:span text:style-name="T27">設定網域別名，指向另一個網域</text:span></text:p>
          </table:table-cell>
          <table:table-cell table:style-name="表格83.A3" office:value-type="string">
            <text:p text:style-name="P15"><text:span text:style-name="T27">www → google.com</text:span></text:p>
          </table:table-cell>
        </table:table-row>
      </table:table>
      <text:p text:style-name="P24"><text:span text:style-name="T17">（補充：AAAA record → 回傳 IPv6 位址，見第三篇 Dual Stack。）</text:span></text:p>
      <text:h text:style-name="P2" text:outline-level="2"><text:span text:style-name="T4">二、DNS 查詢流程（必考重點）</text:span>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8"><text:span text:style-name="T33">📚 <text:s/></text:span><text:span text:style-name="T10">圖書館找書比喻</text:span></text:p>
            <text:p text:style-name="P19"><text:span text:style-name="T28">你要找一本書，書名叫「google.com」：</text:span></text:p>
            <text:p text:style-name="P20"><text:span text:style-name="T28">① 先翻自己的筆記本（Cache）→ 記得放哪就直接去</text:span></text:p>
            <text:p text:style-name="P20"><text:span text:style-name="T28">② 問圖書館員（Local DNS）→「你知道這本書嗎？」</text:span></text:p>
            <text:p text:style-name="P20"><text:span text:style-name="T28">③ 館員問館長（Root DNS）→「這本是哪個分類？」→「外文區」</text:span></text:p>
            <text:p text:style-name="P20"><text:span text:style-name="T28">④ 去外文區管理員（TLD：.com）→「google 在哪個書架？」</text:span></text:p>
            <text:p text:style-name="P20"><text:span text:style-name="T28">⑤ 書架管理員（Authoritative DNS）→ 直接給你確切位置（IP）✓</text:span>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12"><text:span text:style-name="T25">步驟</text:span></text:p>
          </table:table-cell>
          <table:table-cell table:style-name="表格84.A2" office:value-type="string">
            <text:p text:style-name="P12"><text:span text:style-name="T25">層級</text:span></text:p>
          </table:table-cell>
          <table:table-cell table:style-name="表格84.A2" office:value-type="string">
            <text:p text:style-name="P12"><text:span text:style-name="T25">說明</text:span></text:p>
          </table:table-cell>
        </table:table-row>
        <table:table-row table:style-name="表格84.1">
          <table:table-cell table:style-name="表格84.A3" office:value-type="string">
            <text:p text:style-name="P15"><text:span text:style-name="T31">1</text:span></text:p>
          </table:table-cell>
          <table:table-cell table:style-name="表格84.A3" office:value-type="string">
            <text:p text:style-name="P15"><text:span text:style-name="T31">本機快取（Cache）</text:span></text:p>
          </table:table-cell>
          <table:table-cell table:style-name="表格84.A3" office:value-type="string">
            <text:p text:style-name="P15"><text:span text:style-name="T31">先檢查電腦或瀏覽器有無記住此網址的 IP。有→直接用；沒有→下一步。</text:span></text:p>
          </table:table-cell>
        </table:table-row>
        <table:table-row table:style-name="表格84.1">
          <table:table-cell table:style-name="表格84.A4" office:value-type="string">
            <text:p text:style-name="P15"><text:span text:style-name="T31">2</text:span></text:p>
          </table:table-cell>
          <table:table-cell table:style-name="表格84.A4" office:value-type="string">
            <text:p text:style-name="P15"><text:span text:style-name="T31">Local DNS 伺服器</text:span></text:p>
          </table:table-cell>
          <table:table-cell table:style-name="表格84.A4" office:value-type="string">
            <text:p text:style-name="P15"><text:span text:style-name="T31">向 ISP（如中華電信）或自設 DNS（如 8.8.8.8）查詢。</text:span></text:p>
          </table:table-cell>
        </table:table-row>
        <table:table-row table:style-name="表格84.1">
          <table:table-cell table:style-name="表格84.A3" office:value-type="string">
            <text:p text:style-name="P15"><text:span text:style-name="T31">3</text:span></text:p>
          </table:table-cell>
          <table:table-cell table:style-name="表格84.A3" office:value-type="string">
            <text:p text:style-name="P15"><text:span text:style-name="T31">Root DNS 伺服器</text:span></text:p>
          </table:table-cell>
          <table:table-cell table:style-name="表格84.A3" office:value-type="string">
            <text:p text:style-name="P15"><text:span text:style-name="T31">全球共 13 組根 DNS。不知道答案，但會指向對應的 TLD DNS。</text:span></text:p>
          </table:table-cell>
        </table:table-row>
        <table:table-row table:style-name="表格84.1">
          <table:table-cell table:style-name="表格84.A4" office:value-type="string">
            <text:p text:style-name="P15"><text:span text:style-name="T31">4</text:span></text:p>
          </table:table-cell>
          <table:table-cell table:style-name="表格84.A4" office:value-type="string">
            <text:p text:style-name="P15"><text:span text:style-name="T31">TLD DNS 伺服器</text:span></text:p>
          </table:table-cell>
          <table:table-cell table:style-name="表格84.A4" office:value-type="string">
            <text:p text:style-name="P15"><text:span text:style-name="T31">負責管理頂層網域（.com、.tw）。回應 Authoritative DNS 的位置。</text:span></text:p>
          </table:table-cell>
        </table:table-row>
        <table:table-row table:style-name="表格84.1">
          <table:table-cell table:style-name="表格84.A3" office:value-type="string">
            <text:p text:style-name="P15"><text:span text:style-name="T31">5</text:span></text:p>
          </table:table-cell>
          <table:table-cell table:style-name="表格84.A3" office:value-type="string">
            <text:p text:style-name="P15"><text:span text:style-name="T31">Authoritative DNS</text:span></text:p>
          </table:table-cell>
          <table:table-cell table:style-name="表格84.A3" office:value-type="string">
            <text:p text:style-name="P15"><text:span text:style-name="T31">真正儲存答案的伺服器，直接回傳正確的 IP 位址。</text:span></text:p>
          </table:table-cell>
        </table:table-row>
        <table:table-row table:style-name="表格84.1">
          <table:table-cell table:style-name="表格84.A4" office:value-type="string">
            <text:p text:style-name="P15"><text:span text:style-name="T31">6</text:span></text:p>
          </table:table-cell>
          <table:table-cell table:style-name="表格84.A4" office:value-type="string">
            <text:p text:style-name="P15"><text:span text:style-name="T31">回傳 IP 位址 ✓</text:span></text:p>
          </table:table-cell>
          <table:table-cell table:style-name="表格84.A4" office:value-type="string">
            <text:p text:style-name="P15"><text:span text:style-name="T31">瀏覽器取得 IP 開始連線，結果存入快取，下次更快。</text:span>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8"><text:span text:style-name="T33">📌 <text:s/></text:span><text:span text:style-name="T49">一句話總結</text:span></text:p>
            <text:p text:style-name="P19"><text:span text:style-name="T28">DNS 解析為「由快取開始，經 Local DNS，逐層向 Root、TLD、Authoritative DNS 查詢，最後取得 IP 位址」。</text:span></text:p>
          </table:table-cell>
          <table:covered-table-cell/>
          <table:covered-table-cell/>
        </table:table-row>
      </table:table>
      <text:h text:style-name="P2" text:outline-level="2"><text:soft-page-break/><text:span text:style-name="T4">三、Recursive vs. Iterative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8"><text:span text:style-name="T33">⚠️ <text:s/></text:span><text:span text:style-name="T39">最關鍵的差別</text:span></text:p>
            <text:p text:style-name="P19"><text:span text:style-name="T28">兩種方式的路徑相同（Cache → Local → Root → TLD → Auth），唯一差別只有一件事：「誰去問」。</text:span></text:p>
            <text:p text:style-name="P20"><text:span text:style-name="T28">→ DNS 幫你問完 ＝ Recursive（遞迴）；你自己去問 ＝ Iterative（反覆）。</text:span>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13"><text:span text:style-name="T22">比較項目</text:span></text:p>
          </table:table-cell>
          <table:table-cell table:style-name="表格85.A2" office:value-type="string">
            <text:p text:style-name="P13"><text:span text:style-name="T22">Recursive（遞迴）</text:span></text:p>
          </table:table-cell>
          <table:table-cell table:style-name="表格85.A2" office:value-type="string">
            <text:p text:style-name="P13"><text:span text:style-name="T22">Iterative（反覆）</text:span></text:p>
          </table:table-cell>
        </table:table-row>
        <table:table-row table:style-name="表格85.1">
          <table:table-cell table:style-name="表格85.A3" office:value-type="string">
            <text:p text:style-name="P15"><text:span text:style-name="T27">誰去問</text:span></text:p>
          </table:table-cell>
          <table:table-cell table:style-name="表格85.A3" office:value-type="string">
            <text:p text:style-name="P15"><text:span text:style-name="T27">DNS 伺服器代替你問完</text:span></text:p>
          </table:table-cell>
          <table:table-cell table:style-name="表格85.A3" office:value-type="string">
            <text:p text:style-name="P15"><text:span text:style-name="T27">你自己逐層查詢</text:span></text:p>
          </table:table-cell>
        </table:table-row>
        <table:table-row table:style-name="表格85.1">
          <table:table-cell table:style-name="表格85.A4" office:value-type="string">
            <text:p text:style-name="P15"><text:span text:style-name="T27">問幾次</text:span></text:p>
          </table:table-cell>
          <table:table-cell table:style-name="表格85.A4" office:value-type="string">
            <text:p text:style-name="P15"><text:span text:style-name="T27">你只問 1 次</text:span></text:p>
          </table:table-cell>
          <table:table-cell table:style-name="表格85.A4" office:value-type="string">
            <text:p text:style-name="P15"><text:span text:style-name="T27">每層各問一次，共多次</text:span></text:p>
          </table:table-cell>
        </table:table-row>
        <table:table-row table:style-name="表格85.1">
          <table:table-cell table:style-name="表格85.A3" office:value-type="string">
            <text:p text:style-name="P15"><text:span text:style-name="T27">常見場合</text:span></text:p>
          </table:table-cell>
          <table:table-cell table:style-name="表格85.A3" office:value-type="string">
            <text:p text:style-name="P15"><text:span text:style-name="T27">一般使用者 → Local DNS</text:span></text:p>
          </table:table-cell>
          <table:table-cell table:style-name="表格85.A3" office:value-type="string">
            <text:p text:style-name="P15"><text:span text:style-name="T27">DNS 伺服器之間互相查詢</text:span></text:p>
          </table:table-cell>
        </table:table-row>
        <table:table-row table:style-name="表格85.1">
          <table:table-cell table:style-name="表格85.A4" office:value-type="string">
            <text:p text:style-name="P15"><text:span text:style-name="T27">記憶口訣</text:span></text:p>
          </table:table-cell>
          <table:table-cell table:style-name="表格85.A4" office:value-type="string">
            <text:p text:style-name="P15"><text:span text:style-name="T37">代查到底</text:span></text:p>
          </table:table-cell>
          <table:table-cell table:style-name="表格85.A4" office:value-type="string">
            <text:p text:style-name="P15"><text:span text:style-name="T6">逐層詢問</text:span>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8"><text:span text:style-name="T33">🗣️ <text:s/></text:span><text:span text:style-name="T10">問路比喻</text:span></text:p>
            <text:p text:style-name="P19"><text:span text:style-name="T12">Recursive（朋友幫你問完）：</text:span><text:span text:style-name="T28">你只問朋友（Local DNS）一次「台北101在哪？」朋友自己跑完 Root→TLD→Auth，回你 IP，你沒動過。</text:span></text:p>
            <text:p text:style-name="P20"><text:span text:style-name="T12">Iterative（你自己跑全程）：</text:span><text:span text:style-name="T28">你問 Root「我不知道，去問 TLD」→ 你問 TLD「去問 Auth」→ 你問 Auth 拿到 IP，全程你自己跑。</text:span></text:p>
            <text:p text:style-name="P20"><text:span text:style-name="T3">為什麼有兩種？</text:span><text:span text:style-name="T28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2" text:outline-level="2"><text:span text:style-name="T4">四、Open Resolver 風險</text:span></text:h>
      <text:p text:style-name="P24"><text:span text:style-name="T28">Open Resolver 是對外完全開放、任何人都可以使用的 DNS 伺服器；因為沒有存取限制，容易成為攻擊目標。</text:span></text:p>
      <table:table table:name="表格86" table:style-name="表格86">
        <table:table-column table:style-name="表格86.A"/>
        <table:table-column table:style-name="表格86.B"/>
        <table:table-header-rows>
          <table:table-row table:style-name="表格86.1">
            <table:table-cell table:style-name="表格86.A1" office:value-type="string">
              <text:p text:style-name="P12"><text:span text:style-name="T22">⚠️ Cache Poisoning（快取污染）</text:span></text:p>
            </table:table-cell>
            <table:table-cell table:style-name="表格86.A1" office:value-type="string">
              <text:p text:style-name="P12"><text:span text:style-name="T22">⚡ DDoS 放大攻擊（反射攻擊）</text:span>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15"><text:span text:style-name="T27">攻擊者偽造 DNS 回應，將惡意 IP 植入 DNS 快取，使用者被引導至釣魚網站。流程：偽造回應 → DNS 存假 IP → 用戶連到釣魚網站。</text:span></text:p>
          </table:table-cell>
          <table:table-cell table:style-name="表格86.A2" office:value-type="string">
            <text:p text:style-name="P15"><text:span text:style-name="T27">攻擊者偽造受害者 IP 發送查詢，DNS 回傳大量資料給受害者，形成流量放大效果。流程：小封包 → DNS 回超大資料 → 灌爆受害者。</text:span></text:p>
          </table:table-cell>
        </table:table-row>
      </table:table>
      <text:h text:style-name="P2" text:outline-level="2"><text:span text:style-name="T4">五、DNSSEC — DNS 安全機制</text:span></text:h>
      <text:p text:style-name="P24"><text:span text:style-name="T28">DNSSEC（DNS Security Extensions）透過數位簽章機制，讓接收方能驗證 DNS 回應的真實性與完整性，防止資料被偽造或篡改。</text:span></text:p>
      <table:table table:name="表格87" table:style-name="表格87">
        <table:table-column table:style-name="表格87.A"/>
        <table:table-column table:style-name="表格87.B"/>
        <table:table-header-rows>
          <table:table-row table:style-name="表格87.1">
            <table:table-cell table:style-name="表格87.A1" office:value-type="string">
              <text:p text:style-name="P12"><text:span text:style-name="T22">✅ DNSSEC 可以防禦</text:span></text:p>
            </table:table-cell>
            <table:table-cell table:style-name="表格87.A1" office:value-type="string">
              <text:p text:style-name="P12"><text:span text:style-name="T22">❌ DNSSEC 無法防禦</text:span>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15"><text:span text:style-name="T27">防止 DNS Spoofing（假回應）／防止 Cache Poisoning（快取污染）／驗證資料完整性與來源真實性</text:span></text:p>
          </table:table-cell>
          <table:table-cell table:style-name="表格87.A2" office:value-type="string">
            <text:p text:style-name="P15"><text:span text:style-name="T27">不提供加密功能（非 HTTPS）／無法防禦 DoS / DDoS 攻擊／無法保護隱私</text:span>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8"><text:span text:style-name="T33">⚠️ <text:s/></text:span><text:span text:style-name="T49">最重要的一句話</text:span></text:p>
            <text:p text:style-name="P19"><text:span text:style-name="T50">DNSSEC = 驗證真偽，不是加密，不防 DDoS</text:span></text:p>
          </table:table-cell>
          <table:covered-table-cell/>
        </table:table-row>
      </table:table>
      <text:h text:style-name="P2" text:outline-level="2"><text:span text:style-name="T4">六、DNS 故障排查與申論標準答案</text:span>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8"><text:span text:style-name="T33">🔍 <text:s/></text:span><text:span text:style-name="T10">診斷結論</text:span></text:p>
            <text:p text:style-name="P19"><text:span text:style-name="T28">能用 IP 連線（ping 142.250.1.1 成功），但無法用網域名稱連線（ping google.com 失敗）→ DNS 解析失敗，與網路連線本身無關。</text:span>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18"><text:span text:style-name="T33">📝 <text:s/></text:span><text:span text:style-name="T45">申論題標準答案</text:span></text:p>
            <text:p text:style-name="P19"><text:span text:style-name="T46">一、DNS 功能：</text:span><text:span text:style-name="T28">DNS 為網際網路中負責將網域名稱轉換為 IP 位址的分散式系統。</text:span></text:p>
            <text:p text:style-name="P20"><text:span text:style-name="T46">二、查詢流程：</text:span><text:span text:style-name="T28">由快取開始，依序向 Local DNS、Root DNS、TLD DNS、Authoritative DNS 查詢，最終取得 IP 位址。</text:span></text:p>
            <text:p text:style-name="P20"><text:span text:style-name="T46">三、Recursive：</text:span><text:span text:style-name="T28">由 DNS 伺服器代替用戶端完整查詢並直接回傳最終 IP，用戶端只需等待結果。</text:span></text:p>
            <text:p text:style-name="P20"><text:span text:style-name="T46">四、Iterative：</text:span><text:span text:style-name="T28">DNS 伺服器僅回應下一步查詢位置，由用戶端自行逐層向各 DNS 查詢，直到取得 IP。</text:span></text:p>
            <text:p text:style-name="P20"><text:span text:style-name="T46">五、DNSSEC：</text:span><text:span text:style-name="T28">透過數位簽章驗證 DNS 回應真實性，可防 DNS Spoofing 及 Cache Poisoning，但不提供加密，也無法防禦 DDoS。</text:span></text:p>
          </table:table-cell>
        </table:table-row>
      </table:table>
      <text:h text:style-name="P1" text:outline-level="1"><text:span text:style-name="T23">第 七 篇　路由協定：OSPF 與 BGP</text:span>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8"><text:span text:style-name="T33">🗺️ <text:s/></text:span><text:span text:style-name="T10">在解決什麼問題？</text:span></text:p>
            <text:p text:style-name="P19"><text:span text:style-name="T28">網路上有無數個路由器（Router），它們只有一個任務：「資料要走哪條路才能抵達目的地？」它們需要一套共通的對話規則，這就是路由協定。</text:span></text:p>
          </table:table-cell>
        </table:table-row>
      </table:table>
      <text:h text:style-name="P2" text:outline-level="2"><text:span text:style-name="T4">一、路由協定兩大分類：IGP vs EGP</text:span></text:h>
      <table:table table:name="表格90" table:style-name="表格90">
        <table:table-column table:style-name="表格90.A"/>
        <table:table-column table:style-name="表格90.B"/>
        <table:table-header-rows>
          <table:table-row table:style-name="表格90.1">
            <table:table-cell table:style-name="表格90.A1" office:value-type="string">
              <text:p text:style-name="P12"><text:span text:style-name="T22">🏢 IGP — 內部用</text:span></text:p>
            </table:table-cell>
            <table:table-cell table:style-name="表格90.A1" office:value-type="string">
              <text:p text:style-name="P12"><text:span text:style-name="T22">🌍 EGP — 外部用</text:span>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15"><text:span text:style-name="T27">Interior Gateway Protocol，在同一個組織內部使用（公司內網、校園網路）。常見：OSPF（最主流）、RIP（較舊）。</text:span></text:p>
          </table:table-cell>
          <table:table-cell table:style-name="表格90.A2" office:value-type="string">
            <text:p text:style-name="P15"><text:span text:style-name="T27">Exterior Gateway Protocol，在不同組織之間使用（中華電信 ↔ Google、ISP ↔ ISP）。目前唯一在用：BGP（現代標準）。</text:span>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8"><text:span text:style-name="T33">⚡ <text:s/></text:span><text:span text:style-name="T35">一句話記憶法</text:span></text:p>
            <text:p text:style-name="P19"><text:span text:style-name="T28">公司／校園內 → 用 IGP（OSPF 或 RIP）；公司與公司間 → 用 EGP（BGP）。</text:span></text:p>
          </table:table-cell>
          <table:covered-table-cell/>
        </table:table-row>
      </table:table>
      <text:h text:style-name="P2" text:outline-level="2"><text:span text:style-name="T4">二、OSPF 的核心概念</text:span></text:h>
      <text:p text:style-name="P24"><text:span text:style-name="T28">OSPF（Open Shortest Path First）是 IGP 裡最主流的協定，最大特色是把網路切成多個區域（Area）管理。</text:span>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8"><text:span text:style-name="T33">📌 <text:s/></text:span><text:span text:style-name="T49">最重要的規定</text:span></text:p>
            <text:p text:style-name="P19"><text:span text:style-name="T28">所有 Area 都必須連到 Area 0（骨幹區域）。Area 0 就像高速公路主幹道，其他 Area 是交流道。</text:span></text:p>
          </table:table-cell>
        </table:table-row>
      </table:table>
      <text:h text:style-name="P2" text:outline-level="2"><text:span text:style-name="T4">三、OSPF 的 4 種 Router（重點！）</text:span></text:h>
      <text:p text:style-name="P24"><text:span text:style-name="T28">把整個 OSPF 網路想像成一座城市：城市裡有很多「區（Area）」像大樓；中間一定有「主幹道」就是 Area 0；所有大樓要互通都必須先連到 Area 0。</text:span>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13"><text:span text:style-name="T25">類型</text:span></text:p>
            </table:table-cell>
            <table:table-cell table:style-name="表格92.A1" office:value-type="string">
              <text:p text:style-name="P13"><text:span text:style-name="T25">本質</text:span></text:p>
            </table:table-cell>
            <table:table-cell table:style-name="表格92.A1" office:value-type="string">
              <text:p text:style-name="P13"><text:span text:style-name="T25">核心記憶點</text:span></text:p>
            </table:table-cell>
            <table:table-cell table:style-name="表格92.A1" office:value-type="string">
              <text:p text:style-name="P13"><text:span text:style-name="T25">比喻</text:span>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15"><text:span text:style-name="T31">① Internal</text:span></text:p>
          </table:table-cell>
          <table:table-cell table:style-name="表格92.A2" office:value-type="string">
            <text:p text:style-name="P15"><text:span text:style-name="T31">不出 Area</text:span></text:p>
          </table:table-cell>
          <table:table-cell table:style-name="表格92.A2" office:value-type="string">
            <text:p text:style-name="P15"><text:span text:style-name="T31">只在同一個 Area 裡活動，對外一無所知</text:span></text:p>
          </table:table-cell>
          <table:table-cell table:style-name="表格92.A2" office:value-type="string">
            <text:p text:style-name="P15"><text:span text:style-name="T31">只在一個辦公室活動的員工</text:span></text:p>
          </table:table-cell>
        </table:table-row>
        <table:table-row table:style-name="表格92.1">
          <table:table-cell table:style-name="表格92.A3" office:value-type="string">
            <text:p text:style-name="P15"><text:span text:style-name="T31">② Backbone</text:span></text:p>
          </table:table-cell>
          <table:table-cell table:style-name="表格92.A3" office:value-type="string">
            <text:p text:style-name="P15"><text:span text:style-name="T31">在 Area 0</text:span></text:p>
          </table:table-cell>
          <table:table-cell table:style-name="表格92.A3" office:value-type="string">
            <text:p text:style-name="P15"><text:span text:style-name="T31">核心骨幹節點，所有跨區流量都經過這裡</text:span></text:p>
          </table:table-cell>
          <table:table-cell table:style-name="表格92.A3" office:value-type="string">
            <text:p text:style-name="P15"><text:span text:style-name="T31">高速公路主幹上的節點</text:span></text:p>
          </table:table-cell>
        </table:table-row>
        <table:table-row table:style-name="表格92.1">
          <table:table-cell table:style-name="表格92.A2" office:value-type="string">
            <text:p text:style-name="P15"><text:span text:style-name="T31">③ ABR</text:span></text:p>
          </table:table-cell>
          <table:table-cell table:style-name="表格92.A2" office:value-type="string">
            <text:p text:style-name="P15"><text:span text:style-name="T31">跨 Area 橋樑</text:span></text:p>
          </table:table-cell>
          <table:table-cell table:style-name="表格92.A2" office:value-type="string">
            <text:p text:style-name="P15"><text:span text:style-name="T31">同時連 Area 0 與其他 Area，是區域間唯一合法的橋</text:span></text:p>
          </table:table-cell>
          <table:table-cell table:style-name="表格92.A2" office:value-type="string">
            <text:p text:style-name="P15"><text:span text:style-name="T31">不同部門之間的聯絡窗口</text:span></text:p>
          </table:table-cell>
        </table:table-row>
        <table:table-row table:style-name="表格92.1">
          <table:table-cell table:style-name="表格92.A3" office:value-type="string">
            <text:p text:style-name="P15"><text:span text:style-name="T31">④ ASBR</text:span></text:p>
          </table:table-cell>
          <table:table-cell table:style-name="表格92.A3" office:value-type="string">
            <text:p text:style-name="P15"><text:span text:style-name="T31">跨 AS 入口</text:span></text:p>
          </table:table-cell>
          <table:table-cell table:style-name="表格92.A3" office:value-type="string">
            <text:p text:style-name="P15"><text:span text:style-name="T31">把外部路由（BGP/靜態）引入 OSPF，是對外入口</text:span></text:p>
          </table:table-cell>
          <table:table-cell table:style-name="表格92.A3" office:value-type="string">
            <text:p text:style-name="P15"><text:span text:style-name="T31">公司對外的大門警衛室</text:span>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8"><text:span text:style-name="T33">⚠️ <text:s/></text:span><text:span text:style-name="T39">考試最愛考的三個陷阱</text:span></text:p>
            <text:p text:style-name="P19"><text:span text:style-name="T43">✗ ABR 負責連接外部網路　→　</text:span><text:span text:style-name="T28">✓ ABR 只負責 Area 之間的橋樑，對外是 ASBR 的工作。</text:span></text:p>
            <text:p text:style-name="P20"><text:span text:style-name="T43">✗ ASBR 是用來跨越不同 Area　→　</text:span><text:span text:style-name="T28">✓ ASBR 是跨越不同 AS（整個系統），不是跨 Area。</text:span></text:p>
            <text:p text:style-name="P20"><text:span text:style-name="T43">✗ 任意兩個 Area 可直接相連　→　</text:span><text:span text:style-name="T28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4">四、AS-PATH 到底是什麼？</text:span></text:h>
      <table:table table:name="表格93" table:style-name="表格93">
        <table:table-column table:style-name="表格93.A"/>
        <table:table-column table:style-name="表格93.B"/>
        <table:table-header-rows>
          <table:table-row table:style-name="表格93.1">
            <table:table-cell table:style-name="表格93.A1" office:value-type="string">
              <text:p text:style-name="P12"><text:span text:style-name="T22">📦 路由（Route）</text:span></text:p>
            </table:table-cell>
            <table:table-cell table:style-name="表格93.A1" office:value-type="string">
              <text:p text:style-name="P12"><text:span text:style-name="T22">📜 AS-PATH</text:span>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15"><text:span text:style-name="T27">回答「我要怎麼走到目的地？」例：到 Google → 走 A→B→C。這是一條「路徑」，告訴封包要往哪走。</text:span></text:p>
          </table:table-cell>
          <table:table-cell table:style-name="表格93.A2" office:value-type="string">
            <text:p text:style-name="P15"><text:span text:style-name="T27">回答「這條路經過了哪些 AS？」例：[AS1, AS2, AS3]。這是一份「經過紀錄」，描述路徑的履歷。</text:span></text:p>
          </table:table-cell>
        </table:table-row>
        <table:table-row table:style-name="表格93.1">
          <table:table-cell table:style-name="表格93.A3" table:number-columns-spanned="2" office:value-type="string">
            <text:p text:style-name="P18"><text:span text:style-name="T33">📦 <text:s/></text:span><text:span text:style-name="T10">生活比喻：包裹寄送</text:span></text:p>
            <text:p text:style-name="P19"><text:span text:style-name="T29">路由（Route）→ </text:span><text:span text:style-name="T28">包裹實際走的路：台北 → 東京 → 美國。</text:span></text:p>
            <text:p text:style-name="P20"><text:span text:style-name="T29">AS-PATH → </text:span><text:span text:style-name="T28">貼在包裹上的紀錄：黑貓 → 日本郵政 → USPS。</text:span></text:p>
            <text:p text:style-name="P20"><text:span text:style-name="T28">路由是「實際行動」，AS-PATH 是「行動的紀錄」。</text:span></text:p>
          </table:table-cell>
          <table:covered-table-cell/>
        </table:table-row>
      </table:table>
      <text:h text:style-name="P2" text:outline-level="2"><text:span text:style-name="T4">五、BGP 怎麼選最佳路徑？（九步選路）</text:span></text:h>
      <text:p text:style-name="P24"><text:span text:style-name="T28">BGP 不會自己計算最短距離（那是 OSPF 做的事），它是在「比條件」，政策優先。依序比較，前面贏就停。</text:span>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12"><text:span text:style-name="T25">步驟</text:span></text:p>
            </table:table-cell>
            <table:table-cell table:style-name="表格94.A1" office:value-type="string">
              <text:p text:style-name="P12"><text:span text:style-name="T25">屬性</text:span></text:p>
            </table:table-cell>
            <table:table-cell table:style-name="表格94.A1" office:value-type="string">
              <text:p text:style-name="P12"><text:span text:style-name="T25">說明</text:span></text:p>
            </table:table-cell>
            <table:table-cell table:style-name="表格94.A1" office:value-type="string">
              <text:p text:style-name="P12"><text:span text:style-name="T25">備註</text:span>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14"><text:span text:style-name="T27">①</text:span></text:p>
          </table:table-cell>
          <table:table-cell table:style-name="表格94.A2" office:value-type="string">
            <text:p text:style-name="P15"><text:span text:style-name="T31">Weight</text:span></text:p>
          </table:table-cell>
          <table:table-cell table:style-name="表格94.A2" office:value-type="string">
            <text:p text:style-name="P15"><text:span text:style-name="T31">數值越高越優先</text:span></text:p>
          </table:table-cell>
          <table:table-cell table:style-name="表格94.A2" office:value-type="string">
            <text:p text:style-name="P15"><text:span text:style-name="T31">⚠️ Cisco 私有，他牌無此屬性</text:span></text:p>
          </table:table-cell>
        </table:table-row>
        <table:table-row table:style-name="表格94.1">
          <table:table-cell table:style-name="表格94.A3" office:value-type="string">
            <text:p text:style-name="P14"><text:span text:style-name="T27">②</text:span></text:p>
          </table:table-cell>
          <table:table-cell table:style-name="表格94.A3" office:value-type="string">
            <text:p text:style-name="P15"><text:span text:style-name="T5">Local Preference</text:span></text:p>
          </table:table-cell>
          <table:table-cell table:style-name="表格94.A3" office:value-type="string">
            <text:p text:style-name="P15"><text:span text:style-name="T31">數值越高越優先</text:span></text:p>
          </table:table-cell>
          <table:table-cell table:style-name="表格94.A3" office:value-type="string">
            <text:p text:style-name="P15"><text:span text:style-name="T5">✅ 最重要的通用屬性（考試重點）</text:span></text:p>
          </table:table-cell>
        </table:table-row>
        <table:table-row table:style-name="表格94.1">
          <table:table-cell table:style-name="表格94.A2" office:value-type="string">
            <text:p text:style-name="P14"><text:span text:style-name="T27">③</text:span></text:p>
          </table:table-cell>
          <table:table-cell table:style-name="表格94.A2" office:value-type="string">
            <text:p text:style-name="P15"><text:span text:style-name="T31">本地產生</text:span></text:p>
          </table:table-cell>
          <table:table-cell table:style-name="表格94.A2" office:value-type="string">
            <text:p text:style-name="P15"><text:span text:style-name="T31">network / aggregate 產生的路由優先</text:span></text:p>
          </table:table-cell>
          <table:table-cell table:style-name="表格94.A2" office:value-type="string">
            <text:p text:style-name="P15"><text:span text:style-name="T31">自己產生的路最可靠</text:span></text:p>
          </table:table-cell>
        </table:table-row>
        <table:table-row table:style-name="表格94.1">
          <table:table-cell table:style-name="表格94.A3" office:value-type="string">
            <text:p text:style-name="P14"><text:span text:style-name="T27">④</text:span></text:p>
          </table:table-cell>
          <table:table-cell table:style-name="表格94.A3" office:value-type="string">
            <text:p text:style-name="P15"><text:span text:style-name="T31">AS-PATH</text:span></text:p>
          </table:table-cell>
          <table:table-cell table:style-name="表格94.A3" office:value-type="string">
            <text:p text:style-name="P15"><text:span text:style-name="T31">路徑越短（經過 AS 越少）越優先</text:span></text:p>
          </table:table-cell>
          <table:table-cell table:style-name="表格94.A3" office:value-type="string">
            <text:p text:style-name="P15"><text:span text:style-name="T31">這才是 AS-PATH 被使用的時機</text:span></text:p>
          </table:table-cell>
        </table:table-row>
        <table:table-row table:style-name="表格94.1">
          <table:table-cell table:style-name="表格94.A2" office:value-type="string">
            <text:p text:style-name="P14"><text:span text:style-name="T27">⑤</text:span></text:p>
          </table:table-cell>
          <table:table-cell table:style-name="表格94.A2" office:value-type="string">
            <text:p text:style-name="P15"><text:span text:style-name="T31">Origin</text:span></text:p>
          </table:table-cell>
          <table:table-cell table:style-name="表格94.A2" office:value-type="string">
            <text:p text:style-name="P15"><text:span text:style-name="T31">IGP &gt; EGP &gt; Incomplete</text:span></text:p>
          </table:table-cell>
          <table:table-cell table:style-name="表格94.A2" office:value-type="string">
            <text:p text:style-name="P15"><text:span text:style-name="T31">來源越明確越好</text:span></text:p>
          </table:table-cell>
        </table:table-row>
        <table:table-row table:style-name="表格94.1">
          <table:table-cell table:style-name="表格94.A3" office:value-type="string">
            <text:p text:style-name="P14"><text:span text:style-name="T27">⑥</text:span></text:p>
          </table:table-cell>
          <table:table-cell table:style-name="表格94.A3" office:value-type="string">
            <text:p text:style-name="P15"><text:span text:style-name="T31">MED</text:span></text:p>
          </table:table-cell>
          <table:table-cell table:style-name="表格94.A3" office:value-type="string">
            <text:p text:style-name="P15"><text:span text:style-name="T31">數值越小越優先</text:span></text:p>
          </table:table-cell>
          <table:table-cell table:style-name="表格94.A3" office:value-type="string">
            <text:p text:style-name="P15"><text:span text:style-name="T31">只比較同一個 AS 來的路由</text:span></text:p>
          </table:table-cell>
        </table:table-row>
        <table:table-row table:style-name="表格94.1">
          <table:table-cell table:style-name="表格94.A2" office:value-type="string">
            <text:p text:style-name="P14"><text:span text:style-name="T27">⑦</text:span></text:p>
          </table:table-cell>
          <table:table-cell table:style-name="表格94.A2" office:value-type="string">
            <text:p text:style-name="P15"><text:span text:style-name="T31">eBGP vs iBGP</text:span></text:p>
          </table:table-cell>
          <table:table-cell table:style-name="表格94.A2" office:value-type="string">
            <text:p text:style-name="P15"><text:span text:style-name="T31">eBGP 優先於 iBGP</text:span></text:p>
          </table:table-cell>
          <table:table-cell table:style-name="表格94.A2" office:value-type="string">
            <text:p text:style-name="P15"><text:span text:style-name="T31">外部路由比內部同步更優先</text:span></text:p>
          </table:table-cell>
        </table:table-row>
        <table:table-row table:style-name="表格94.1">
          <table:table-cell table:style-name="表格94.A3" office:value-type="string">
            <text:p text:style-name="P14"><text:span text:style-name="T27">⑧</text:span></text:p>
          </table:table-cell>
          <table:table-cell table:style-name="表格94.A3" office:value-type="string">
            <text:p text:style-name="P15"><text:span text:style-name="T31">IGP cost</text:span></text:p>
          </table:table-cell>
          <table:table-cell table:style-name="表格94.A3" office:value-type="string">
            <text:p text:style-name="P15"><text:span text:style-name="T31">到 next-hop 距離越小越優先</text:span></text:p>
          </table:table-cell>
          <table:table-cell table:style-name="表格94.A3" office:value-type="string">
            <text:p text:style-name="P15"><text:span text:style-name="T31">同一路由器內部的距離比較</text:span></text:p>
          </table:table-cell>
        </table:table-row>
        <table:table-row table:style-name="表格94.1">
          <table:table-cell table:style-name="表格94.A2" office:value-type="string">
            <text:p text:style-name="P14"><text:span text:style-name="T27">⑨</text:span></text:p>
          </table:table-cell>
          <table:table-cell table:style-name="表格94.A2" office:value-type="string">
            <text:p text:style-name="P15"><text:span text:style-name="T31">Router ID</text:span></text:p>
          </table:table-cell>
          <table:table-cell table:style-name="表格94.A2" office:value-type="string">
            <text:p text:style-name="P15"><text:span text:style-name="T31">Router ID 最小的優先</text:span></text:p>
          </table:table-cell>
          <table:table-cell table:style-name="表格94.A2" office:value-type="string">
            <text:p text:style-name="P15"><text:span text:style-name="T31">最後的決勝點</text:span>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8"><text:span text:style-name="T33">🧠 <text:s/></text:span><text:span text:style-name="T49">白話理解（這句最重要）</text:span></text:p>
            <text:p text:style-name="P19"><text:span text:style-name="T28">BGP 心裡在想：「哪條路比較值得信任？比較符合政策？」不是「哪條最短」（那是 OSPF 在做的事）。</text:span></text:p>
            <text:p text:style-name="P20"><text:span text:style-name="T50">一句話總結 → </text:span><text:span text:style-name="T28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8"><text:span text:style-name="T33">⚡ <text:s/></text:span><text:span text:style-name="T35">考試口訣（10 秒背）</text:span></text:p>
            <text:p text:style-name="P19"><text:span text:style-name="T28">Weight &gt; Local Pref &gt; 自己產生 &gt; AS-PATH &gt; Origin &gt; MED &gt; eBGP &gt; IGP cost &gt; Router ID（Weight 為 Cisco 私有；Local Pref 是最重要的通用屬性）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pan text:style-name="T4">六、BGP 考試常見陷阱</text:span>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9"><text:span text:style-name="T43">✗ AS-PATH 是 BGP 選路最重要的屬性　→　</text:span><text:span text:style-name="T28">✓ Local Preference 才是最重要的通用屬性（Weight 是 Cisco 私有）。</text:span></text:p>
            <text:p text:style-name="P20"><text:span text:style-name="T43">✗ AS-PATH 越短就一定會選那條　→　</text:span><text:span text:style-name="T28">✓ 只有前面的屬性（Local Pref 等）完全相同時，才會比較 AS-PATH。</text:span></text:p>
            <text:p text:style-name="P20"><text:span text:style-name="T43">✗ BGP 會自己計算最短路徑　→　</text:span><text:span text:style-name="T28">✓ BGP 不算距離，OSPF 才做最短路徑計算。</text:span></text:p>
            <text:p text:style-name="P20"><text:span text:style-name="T43">✗ iBGP 比 eBGP 優先　→　</text:span><text:span text:style-name="T28">✓ eBGP 優先於 iBGP（外部路由更可信）。</text:span></text:p>
            <text:p text:style-name="P20"><text:span text:style-name="T43">✗ MED 可以跨不同 AS 互相比較　→　</text:span><text:span text:style-name="T28">✓ MED 只能比較來自同一個 AS 的路由。</text:span></text:p>
          </table:table-cell>
        </table:table-row>
      </table:table>
      <text:h text:style-name="P2" text:outline-level="2"><text:soft-page-break/><text:span text:style-name="T4">七、BGP + NAT + 防火牆 整合流程</text:span></text:h>
      <text:p text:style-name="P24"><text:span text:style-name="T28">把三個概念串在一起，這才是實務上封包實際走的路。情境：你的電腦要連到健保署，有兩條對外線路（中華電信 AS-PATH 長度 2、台灣固網 AS-PATH 長度 3）。</text:span>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13"><text:span text:style-name="T25">步驟</text:span></text:p>
            </table:table-cell>
            <table:table-cell table:style-name="表格96.A1" office:value-type="string">
              <text:p text:style-name="P13"><text:span text:style-name="T25">動作</text:span></text:p>
            </table:table-cell>
            <table:table-cell table:style-name="表格96.A1" office:value-type="string">
              <text:p text:style-name="P13"><text:span text:style-name="T25">關鍵一句</text:span>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15"><text:span text:style-name="T31">1 封包產生</text:span></text:p>
          </table:table-cell>
          <table:table-cell table:style-name="表格96.A2" office:value-type="string">
            <text:p text:style-name="P15"><text:span text:style-name="T31">你的電腦說「我要去健保署 IP」</text:span></text:p>
          </table:table-cell>
          <table:table-cell table:style-name="表格96.A2" office:value-type="string">
            <text:p text:style-name="P15"><text:span text:style-name="T31">封包準備出發</text:span></text:p>
          </table:table-cell>
        </table:table-row>
        <table:table-row table:style-name="表格96.1">
          <table:table-cell table:style-name="表格96.A3" office:value-type="string">
            <text:p text:style-name="P15"><text:span text:style-name="T31">2 防火牆 Firewall</text:span></text:p>
          </table:table-cell>
          <table:table-cell table:style-name="表格96.A3" office:value-type="string">
            <text:p text:style-name="P15"><text:span text:style-name="T31">看來源/目的 IP、Port，不符就擋掉</text:span></text:p>
          </table:table-cell>
          <table:table-cell table:style-name="表格96.A3" office:value-type="string">
            <text:p text:style-name="P15"><text:span text:style-name="T31">防火牆決定「能不能走」</text:span></text:p>
          </table:table-cell>
        </table:table-row>
        <table:table-row table:style-name="表格96.1">
          <table:table-cell table:style-name="表格96.A2" office:value-type="string">
            <text:p text:style-name="P15"><text:span text:style-name="T31">3 NAT</text:span></text:p>
          </table:table-cell>
          <table:table-cell table:style-name="表格96.A2" office:value-type="string">
            <text:p text:style-name="P15"><text:span text:style-name="T31">把私有 IP 換成公網 IP（192.168.1.10 → 203.66.x.x）</text:span></text:p>
          </table:table-cell>
          <table:table-cell table:style-name="表格96.A2" office:value-type="string">
            <text:p text:style-name="P15"><text:span text:style-name="T31">NAT 解決「你是誰」</text:span></text:p>
          </table:table-cell>
        </table:table-row>
        <table:table-row table:style-name="表格96.1">
          <table:table-cell table:style-name="表格96.A3" office:value-type="string">
            <text:p text:style-name="P15"><text:span text:style-name="T31">4 BGP 選路</text:span></text:p>
          </table:table-cell>
          <table:table-cell table:style-name="表格96.A3" office:value-type="string">
            <text:p text:style-name="P15"><text:span text:style-name="T31">比條件：若相同選 AS-PATH 較短路1；若中華電信 Local Pref 較高則不管長短走路1</text:span></text:p>
          </table:table-cell>
          <table:table-cell table:style-name="表格96.A3" office:value-type="string">
            <text:p text:style-name="P15"><text:span text:style-name="T31">BGP 決定「怎麼走」</text:span></text:p>
          </table:table-cell>
        </table:table-row>
        <table:table-row table:style-name="表格96.1">
          <table:table-cell table:style-name="表格96.A2" office:value-type="string">
            <text:p text:style-name="P15"><text:span text:style-name="T31">5 出 ISP 跨 AS</text:span></text:p>
          </table:table-cell>
          <table:table-cell table:style-name="表格96.A2" office:value-type="string">
            <text:p text:style-name="P15"><text:span text:style-name="T31">封包經過多個 AS（這就是 AS-PATH 的來源）</text:span></text:p>
          </table:table-cell>
          <table:table-cell table:style-name="表格96.A2" office:value-type="string">
            <text:p text:style-name="P15"><text:span text:style-name="T31">—</text:span></text:p>
          </table:table-cell>
        </table:table-row>
        <table:table-row table:style-name="表格96.1">
          <table:table-cell table:style-name="表格96.A3" office:value-type="string">
            <text:p text:style-name="P15"><text:span text:style-name="T31">6 到達健保署</text:span></text:p>
          </table:table-cell>
          <table:table-cell table:style-name="表格96.A3" office:value-type="string">
            <text:p text:style-name="P15"><text:span text:style-name="T31">健保署收到請求，完成連線</text:span></text:p>
          </table:table-cell>
          <table:table-cell table:style-name="表格96.A3" office:value-type="string">
            <text:p text:style-name="P15"><text:span text:style-name="T31">—</text:span>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8"><text:span text:style-name="T33">🎯 <text:s/></text:span><text:span text:style-name="T49">三層分工，一句話各自記</text:span></text:p>
            <text:p text:style-name="P19"><text:span text:style-name="T50">防火牆 → </text:span><text:span text:style-name="T28">決定「能不能走」｜</text:span><text:span text:style-name="T50">NAT → </text:span><text:span text:style-name="T28">解決「你是誰」｜</text:span><text:span text:style-name="T50">BGP → </text:span><text:span text:style-name="T28">決定「要怎麼走」</text:span></text:p>
            <text:p text:style-name="P20"><text:span text:style-name="T28">生活比喻：海關（防火牆）→ 換護照/身份（NAT）→ 選航班（BGP）。</text:span>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8"><text:span text:style-name="T33">⚠️ <text:s/></text:span><text:span text:style-name="T39">整合情境的考試陷阱</text:span></text:p>
            <text:p text:style-name="P19"><text:span text:style-name="T43">✗ 封包送不出去 → 一定是 BGP 問題　→　</text:span><text:span text:style-name="T28">✓ 應依序排查：防火牆有沒有擋？NAT 有沒有設？BGP 有沒有路？</text:span></text:p>
            <text:p text:style-name="P20"><text:span text:style-name="T43">✗ 有路但連不到 → 是 BGP 路由問題　→　</text:span><text:span text:style-name="T28">✓ 通常是防火牆或 NAT 問題，不是 BGP。</text:span></text:p>
            <text:p text:style-name="P20"><text:span text:style-name="T43">✗ 走到錯誤的 ISP → 是 NAT 設定問題　→　</text:span><text:span text:style-name="T28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1" text:outline-level="1"><text:span text:style-name="T23">第 八 篇　網路系統進階：SDN · Load Balancing · CDN · 5G</text:span>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8"><text:span text:style-name="T33">🌐 <text:s/></text:span><text:span text:style-name="T10">本篇重點</text:span></text:p>
            <text:p text:style-name="P19"><text:span text:style-name="T28">本篇涵蓋四大現代網路主題：SDN（網路如何被控制）、Load Balancing（流量如何分配）、CDN（網站如何加速）、5G（新世代行動網路特性）。</text:span></text:p>
          </table:table-cell>
        </table:table-row>
      </table:table>
      <text:h text:style-name="P2" text:outline-level="2"><text:span text:style-name="T4">一、SDN（軟體定義網路）</text:span></text:h>
      <text:p text:style-name="P24"><text:span text:style-name="T28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span>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8"><text:span text:style-name="T33">🟦 <text:s/></text:span><text:span text:style-name="T49">核心概念（考試最常考）</text:span></text:p>
            <text:p text:style-name="P19"><text:span text:style-name="T50">控制平面（Control Plane）：</text:span><text:span text:style-name="T28">決定資料「怎麼走」——負責路由決策的大腦。</text:span></text:p>
            <text:p text:style-name="P20"><text:span text:style-name="T50">資料平面（Data Plane）：</text:span><text:span text:style-name="T28">負責資料「實際傳送」——執行指令的手腳。</text:span></text:p>
            <text:p text:style-name="P20"><text:span text:style-name="T50">🔑 關鍵：</text:span><text:span text:style-name="T28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13"><text:span text:style-name="T25">三層架構</text:span></text:p>
          </table:table-cell>
          <table:table-cell table:style-name="表格98.A2" office:value-type="string">
            <text:p text:style-name="P13"><text:span text:style-name="T25">說明</text:span></text:p>
          </table:table-cell>
          <table:table-cell table:style-name="表格98.A2" office:value-type="string">
            <text:p text:style-name="P13"><text:span text:style-name="T25">白話</text:span></text:p>
          </table:table-cell>
        </table:table-row>
        <table:table-row table:style-name="表格98.1">
          <table:table-cell table:style-name="表格98.A3" office:value-type="string">
            <text:p text:style-name="P15"><text:span text:style-name="T31">🟦 Application Layer 應用層</text:span></text:p>
          </table:table-cell>
          <table:table-cell table:style-name="表格98.A3" office:value-type="string">
            <text:p text:style-name="P15"><text:span text:style-name="T31">使用者所使用的服務，如網頁、API、App</text:span></text:p>
          </table:table-cell>
          <table:table-cell table:style-name="表格98.A3" office:value-type="string">
            <text:p text:style-name="P15"><text:span text:style-name="T31">你真正在用的東西</text:span></text:p>
          </table:table-cell>
        </table:table-row>
        <table:table-row table:style-name="表格98.1">
          <table:table-cell table:style-name="表格98.A4" office:value-type="string">
            <text:p text:style-name="P15"><text:span text:style-name="T31">🟨 Control Layer 控制層</text:span></text:p>
          </table:table-cell>
          <table:table-cell table:style-name="表格98.A4" office:value-type="string">
            <text:p text:style-name="P15"><text:span text:style-name="T31">SDN Controller（大腦），決定資料流向、集中管理</text:span></text:p>
          </table:table-cell>
          <table:table-cell table:style-name="表格98.A4" office:value-type="string">
            <text:p text:style-name="P15"><text:span text:style-name="T31">交通指揮中心</text:span></text:p>
          </table:table-cell>
        </table:table-row>
        <table:table-row table:style-name="表格98.1">
          <table:table-cell table:style-name="表格98.A3" office:value-type="string">
            <text:p text:style-name="P15"><text:span text:style-name="T31">🟩 Infrastructure Layer 基礎層</text:span></text:p>
          </table:table-cell>
          <table:table-cell table:style-name="表格98.A3" office:value-type="string">
            <text:p text:style-name="P15"><text:span text:style-name="T31">真正傳送資料的設備，如 Router、Switch</text:span></text:p>
          </table:table-cell>
          <table:table-cell table:style-name="表格98.A3" office:value-type="string">
            <text:p text:style-name="P15"><text:span text:style-name="T31">路、車道和車子</text:span>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8"><text:span text:style-name="T33">⚡ <text:s/></text:span><text:span text:style-name="T35">記憶口訣</text:span></text:p>
            <text:p text:style-name="P19"><text:span text:style-name="T28">「SDN 分平面、三層 App-控-基」→ 分平面＝控制／資料分離；三層＝Application / Control / Infrastructure。</text:span></text:p>
          </table:table-cell>
          <table:covered-table-cell/>
          <table:covered-table-cell/>
        </table:table-row>
      </table:table>
      <text:h text:style-name="P2" text:outline-level="2"><text:span text:style-name="T4">二、Load Balancing（負載平衡）</text:span></text:h>
      <text:p text:style-name="P24"><text:span text:style-name="T28">當大量使用者同時存取同一網站，單一台伺服器會不堪負荷。負載平衡器把流量「智慧分配」到多台伺服器，確保每台都不過載。</text:span>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13"><text:span text:style-name="T25">策略</text:span></text:p>
            </table:table-cell>
            <table:table-cell table:style-name="表格99.A1" office:value-type="string">
              <text:p text:style-name="P13"><text:span text:style-name="T25">說明</text:span></text:p>
            </table:table-cell>
            <table:table-cell table:style-name="表格99.A1" office:value-type="string">
              <text:p text:style-name="P13"><text:span text:style-name="T25">優 / 缺點</text:span>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15"><text:span text:style-name="T31">① Round Robin（輪詢）</text:span></text:p>
          </table:table-cell>
          <table:table-cell table:style-name="表格99.A2" office:value-type="string">
            <text:p text:style-name="P15"><text:span text:style-name="T31">依序輪流分配，不考慮伺服器效能或負載</text:span></text:p>
          </table:table-cell>
          <table:table-cell table:style-name="表格99.A2" office:value-type="string">
            <text:p text:style-name="P15"><text:span text:style-name="T31">✓ 簡單易實作 ✗ 未考量能力差異</text:span></text:p>
          </table:table-cell>
        </table:table-row>
        <table:table-row table:style-name="表格99.1">
          <table:table-cell table:style-name="表格99.A3" office:value-type="string">
            <text:p text:style-name="P15"><text:span text:style-name="T31">② Weighted Round Robin（加權輪詢）</text:span></text:p>
          </table:table-cell>
          <table:table-cell table:style-name="表格99.A3" office:value-type="string">
            <text:p text:style-name="P15"><text:span text:style-name="T31">依各伺服器處理能力設「權重」，能力強分到更多</text:span></text:p>
          </table:table-cell>
          <table:table-cell table:style-name="表格99.A3" office:value-type="string">
            <text:p text:style-name="P15"><text:span text:style-name="T31">✓ 更智慧利用資源 ✗ 需手動設定權重</text:span></text:p>
          </table:table-cell>
        </table:table-row>
        <table:table-row table:style-name="表格99.1">
          <table:table-cell table:style-name="表格99.A2" office:value-type="string">
            <text:p text:style-name="P15"><text:span text:style-name="T31">③ Session Stickiness（會話黏著）</text:span></text:p>
          </table:table-cell>
          <table:table-cell table:style-name="表格99.A2" office:value-type="string">
            <text:p text:style-name="P15"><text:span text:style-name="T31">同一使用者所有請求固定導向同一台，維持連線狀態</text:span></text:p>
          </table:table-cell>
          <table:table-cell table:style-name="表格99.A2" office:value-type="string">
            <text:p text:style-name="P15"><text:span text:style-name="T31">✓ 狀態一致 ✗ 可能某台過載</text:span>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8"><text:span text:style-name="T33">⚡ <text:s/></text:span><text:span text:style-name="T35">記憶口訣</text:span></text:p>
            <text:p text:style-name="P19"><text:span text:style-name="T28">「LB 輪、重、黏」→ 輪＝Round Robin（輪流）；重＝Weighted RR（加權）；黏＝Stickiness（固定同一台）。</text:span></text:p>
          </table:table-cell>
          <table:covered-table-cell/>
          <table:covered-table-cell/>
        </table:table-row>
      </table:table>
      <text:h text:style-name="P2" text:outline-level="2"><text:soft-page-break/><text:span text:style-name="T4">三、CDN（內容傳遞網路）</text:span></text:h>
      <text:p text:style-name="P24"><text:span text:style-name="T28">CDN（Content Delivery Network）透過在全球各地部署「邊緣伺服器（Edge Server）」加速內容傳遞。當你開啟 Google 或 YouTube，不需跨越太平洋連到美國總部，而是連到你附近的 CDN 節點，大幅縮短延遲。</text:span>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8"><text:span text:style-name="T33">🌍 <text:s/></text:span><text:span text:style-name="T10">CDN 完整流程（一定要記）</text:span></text:p>
            <text:p text:style-name="P19"><text:span text:style-name="T28">Step 1 使用者輸入網址（www.example.com）</text:span></text:p>
            <text:p text:style-name="P20"><text:span text:style-name="T28">Step 2 DNS 解析網址，找到對應 CDN 的 CNAME 記錄</text:span></text:p>
            <text:p text:style-name="P20"><text:span text:style-name="T28">Step 3 CNAME 將請求轉向 CDN 服務商（如 cdn.example.net）</text:span></text:p>
            <text:p text:style-name="P20"><text:span text:style-name="T28">Step 4 CDN 根據使用者地理位置，選擇最近的 Edge 伺服器</text:span></text:p>
            <text:p text:style-name="P20"><text:span text:style-name="T28">Step 5 Edge 伺服器將快取內容回傳給使用者，完成請求</text:span>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13"><text:span text:style-name="T22">關鍵名詞</text:span></text:p>
          </table:table-cell>
          <table:table-cell table:style-name="表格100.A2" office:value-type="string">
            <text:p text:style-name="P13"><text:span text:style-name="T22">說明</text:span></text:p>
          </table:table-cell>
        </table:table-row>
        <table:table-row table:style-name="表格100.1">
          <table:table-cell table:style-name="表格100.A3" office:value-type="string">
            <text:p text:style-name="P15"><text:span text:style-name="T27">CNAME（別名記錄）</text:span></text:p>
          </table:table-cell>
          <table:table-cell table:style-name="表格100.A3" office:value-type="string">
            <text:p text:style-name="P15"><text:span text:style-name="T27">DNS 的一種記錄，作用是「網址指向另一個網址」（不是 IP）。範例：www.example.com → cdn.example.net</text:span></text:p>
          </table:table-cell>
        </table:table-row>
        <table:table-row table:style-name="表格100.1">
          <table:table-cell table:style-name="表格100.A4" office:value-type="string">
            <text:p text:style-name="P15"><text:span text:style-name="T27">Edge Server（邊緣伺服器）</text:span></text:p>
          </table:table-cell>
          <table:table-cell table:style-name="表格100.A4" office:value-type="string">
            <text:p text:style-name="P15"><text:span text:style-name="T27">部署在全球各地靠近使用者的伺服器，負責快取並就近回應請求，大幅減少延遲。</text:span>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8"><text:span text:style-name="T33">⚡ <text:s/></text:span><text:span text:style-name="T35">記憶口訣</text:span></text:p>
            <text:p text:style-name="P19"><text:span text:style-name="T28">「CDN：網址轉轉轉，資料找最近」→ CNAME＝網址→網址（不是 IP！）；Edge＝就近服務，不用跑遠。</text:span></text:p>
          </table:table-cell>
          <table:covered-table-cell/>
        </table:table-row>
      </table:table>
      <text:h text:style-name="P2" text:outline-level="2"><text:span text:style-name="T4">四、5G 新世代行動網路</text:span>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13"><text:span text:style-name="T25">四大核心特性</text:span></text:p>
            </table:table-cell>
            <table:table-cell table:style-name="表格101.A1" office:value-type="string">
              <text:p text:style-name="P13"><text:span text:style-name="T25">說明</text:span>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15"><text:span text:style-name="T31">① 高速傳輸（eMBB）</text:span></text:p>
          </table:table-cell>
          <table:table-cell table:style-name="表格101.A2" office:value-type="string">
            <text:p text:style-name="P15"><text:span text:style-name="T31">Enhanced Mobile Broadband — 比 4G 快數十倍，適合高畫質影音、AR/VR</text:span></text:p>
          </table:table-cell>
        </table:table-row>
        <table:table-row table:style-name="表格101.1">
          <table:table-cell table:style-name="表格101.A3" office:value-type="string">
            <text:p text:style-name="P15"><text:span text:style-name="T31">② 超低延遲（URLLC）</text:span></text:p>
          </table:table-cell>
          <table:table-cell table:style-name="表格101.A3" office:value-type="string">
            <text:p text:style-name="P15"><text:span text:style-name="T31">Ultra-Reliable Low Latency — 延遲低至 1ms 以下，適合自動駕駛、遠端手術</text:span></text:p>
          </table:table-cell>
        </table:table-row>
        <table:table-row table:style-name="表格101.1">
          <table:table-cell table:style-name="表格101.A2" office:value-type="string">
            <text:p text:style-name="P15"><text:span text:style-name="T31">③ 大量連線（mMTC）</text:span></text:p>
          </table:table-cell>
          <table:table-cell table:style-name="表格101.A2" office:value-type="string">
            <text:p text:style-name="P15"><text:span text:style-name="T31">Massive Machine Type — 每平方公里可連數百萬台裝置，適合 IoT 大規模部署</text:span></text:p>
          </table:table-cell>
        </table:table-row>
        <table:table-row table:style-name="表格101.1">
          <table:table-cell table:style-name="表格101.A3" office:value-type="string">
            <text:p text:style-name="P15"><text:span text:style-name="T31">④ 網路切片（Network Slicing）</text:span></text:p>
          </table:table-cell>
          <table:table-cell table:style-name="表格101.A3" office:value-type="string">
            <text:p text:style-name="P15"><text:span text:style-name="T31">將同一物理網路虛擬化為多個獨立「切片」，各自不同 QoS（如一片給醫療、一片給遊戲）</text:span>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8"><text:span text:style-name="T33">⚡ <text:s/></text:span><text:span text:style-name="T35">記憶口訣</text:span></text:p>
            <text:p text:style-name="P19"><text:span text:style-name="T28">「5G 快、低、多、切」→ 快（eMBB）＝高速；低（URLLC）＝超低延遲；多（mMTC）＝大量連線；切＝網路切片。</text:span></text:p>
          </table:table-cell>
          <table:covered-table-cell/>
        </table:table-row>
      </table:table>
      <text:h text:style-name="P2" text:outline-level="2"><text:span text:style-name="T4">五、本篇陷阱與情境串連</text:span>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13"><text:span text:style-name="T25">常見錯誤</text:span></text:p>
            </table:table-cell>
            <table:table-cell table:style-name="表格102.A1" office:value-type="string">
              <text:p text:style-name="P13"><text:span text:style-name="T25">正確觀念</text:span></text:p>
            </table:table-cell>
            <table:table-cell table:style-name="表格102.A1" office:value-type="string">
              <text:p text:style-name="P13"><text:span text:style-name="T25">主題</text:span>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15"><text:span text:style-name="T31">SDN 是把控制與資料整合</text:span></text:p>
          </table:table-cell>
          <table:table-cell table:style-name="表格102.A2" office:value-type="string">
            <text:p text:style-name="P15"><text:span text:style-name="T31">SDN = 控制與資料「分離」</text:span></text:p>
          </table:table-cell>
          <table:table-cell table:style-name="表格102.A2" office:value-type="string">
            <text:p text:style-name="P15"><text:span text:style-name="T31">SDN</text:span></text:p>
          </table:table-cell>
        </table:table-row>
        <table:table-row table:style-name="表格102.1">
          <table:table-cell table:style-name="表格102.A3" office:value-type="string">
            <text:p text:style-name="P15"><text:span text:style-name="T31">Round Robin 會考慮伺服器效能</text:span></text:p>
          </table:table-cell>
          <table:table-cell table:style-name="表格102.A3" office:value-type="string">
            <text:p text:style-name="P15"><text:span text:style-name="T31">RR 不看效能，Weighted RR 才看</text:span></text:p>
          </table:table-cell>
          <table:table-cell table:style-name="表格102.A3" office:value-type="string">
            <text:p text:style-name="P15"><text:span text:style-name="T31">LB</text:span></text:p>
          </table:table-cell>
        </table:table-row>
        <table:table-row table:style-name="表格102.1">
          <table:table-cell table:style-name="表格102.A2" office:value-type="string">
            <text:p text:style-name="P15"><text:span text:style-name="T31">Stickiness 是平均分配流量</text:span></text:p>
          </table:table-cell>
          <table:table-cell table:style-name="表格102.A2" office:value-type="string">
            <text:p text:style-name="P15"><text:span text:style-name="T31">Stickiness = 固定同一台 Server</text:span></text:p>
          </table:table-cell>
          <table:table-cell table:style-name="表格102.A2" office:value-type="string">
            <text:p text:style-name="P15"><text:span text:style-name="T31">LB</text:span></text:p>
          </table:table-cell>
        </table:table-row>
        <table:table-row table:style-name="表格102.1">
          <table:table-cell table:style-name="表格102.A3" office:value-type="string">
            <text:p text:style-name="P15"><text:span text:style-name="T31">CDN 是把資料放在中心機房</text:span></text:p>
          </table:table-cell>
          <table:table-cell table:style-name="表格102.A3" office:value-type="string">
            <text:p text:style-name="P15"><text:span text:style-name="T31">CDN 放在靠近使用者的 Edge 節點</text:span></text:p>
          </table:table-cell>
          <table:table-cell table:style-name="表格102.A3" office:value-type="string">
            <text:p text:style-name="P15"><text:span text:style-name="T31">CDN</text:span></text:p>
          </table:table-cell>
        </table:table-row>
        <table:table-row table:style-name="表格102.1">
          <table:table-cell table:style-name="表格102.A2" office:value-type="string">
            <text:p text:style-name="P15"><text:span text:style-name="T31">CNAME 是 IP 位址的對應</text:span></text:p>
          </table:table-cell>
          <table:table-cell table:style-name="表格102.A2" office:value-type="string">
            <text:p text:style-name="P15"><text:span text:style-name="T31">CNAME = 網址 → 網址（非 IP）</text:span></text:p>
          </table:table-cell>
          <table:table-cell table:style-name="表格102.A2" office:value-type="string">
            <text:p text:style-name="P15"><text:span text:style-name="T31">CDN</text:span></text:p>
          </table:table-cell>
        </table:table-row>
        <table:table-row table:style-name="表格102.1">
          <table:table-cell table:style-name="表格102.A3" office:value-type="string">
            <text:p text:style-name="P15"><text:span text:style-name="T31">WiFi 使用 CSMA/CD</text:span></text:p>
          </table:table-cell>
          <table:table-cell table:style-name="表格102.A3" office:value-type="string">
            <text:p text:style-name="P15"><text:span text:style-name="T31">WiFi 用 CSMA/CA（CD 是有線網路）</text:span></text:p>
          </table:table-cell>
          <table:table-cell table:style-name="表格102.A3" office:value-type="string">
            <text:p text:style-name="P15"><text:span text:style-name="T31">WiFi</text:span></text:p>
          </table:table-cell>
        </table:table-row>
        <text:soft-page-break/>
        <table:table-row table:style-name="表格102.1">
          <table:table-cell table:style-name="表格102.A2" office:value-type="string">
            <text:p text:style-name="P15"><text:span text:style-name="T31">5G 只是速度變快</text:span></text:p>
          </table:table-cell>
          <table:table-cell table:style-name="表格102.A2" office:value-type="string">
            <text:p text:style-name="P15"><text:span text:style-name="T31">5G 還有低延遲、大量連線、網路切片</text:span></text:p>
          </table:table-cell>
          <table:table-cell table:style-name="表格102.A2" office:value-type="string">
            <text:p text:style-name="P15"><text:span text:style-name="T31">5G</text:span>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8"><text:span text:style-name="T33">🔗 <text:s/></text:span><text:span text:style-name="T10">使用情境串連（理解記憶）</text:span></text:p>
            <text:p text:style-name="P19"><text:span text:style-name="T28"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span></text:p>
          </table:table-cell>
          <table:covered-table-cell/>
          <table:covered-table-cell/>
        </table:table-row>
      </table:table>
      <text:h text:style-name="P1" text:outline-level="1"><text:span text:style-name="T23">第 九 篇　無線通訊：WiFi vs Bluetooth</text:span>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8"><text:span text:style-name="T33">💡 <text:s/></text:span><text:span text:style-name="T10">核心問題：大家同時說話會怎樣？</text:span></text:p>
            <text:p text:style-name="P19"><text:span text:style-name="T28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span></text:p>
          </table:table-cell>
        </table:table-row>
      </table:table>
      <text:h text:style-name="P2" text:outline-level="2"><text:span text:style-name="T4">一、WiFi：先聽再講（CSMA/CA）</text:span></text:h>
      <text:p text:style-name="P24"><text:span text:style-name="T28">WiFi 採用「先聽再講」的競爭機制，就像一群人用對講機：① 先聽頻道有沒有人在傳；② 沒人傳才開始傳；③ 有人在傳就等一段隨機時間再試。</text:span>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13"><text:span text:style-name="T22">CSMA/CA 拆解</text:span></text:p>
            </table:table-cell>
            <table:table-cell table:style-name="表格104.A1" office:value-type="string">
              <text:p text:style-name="P13"><text:span text:style-name="T22">意義</text:span>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15"><text:span text:style-name="T27">Carrier Sense 載波感測</text:span></text:p>
          </table:table-cell>
          <table:table-cell table:style-name="表格104.A2" office:value-type="string">
            <text:p text:style-name="P15"><text:span text:style-name="T27">先聽頻道有沒有人在用</text:span></text:p>
          </table:table-cell>
        </table:table-row>
        <table:table-row table:style-name="表格104.1">
          <table:table-cell table:style-name="表格104.A3" office:value-type="string">
            <text:p text:style-name="P15"><text:span text:style-name="T27">Multiple Access 多重存取</text:span></text:p>
          </table:table-cell>
          <table:table-cell table:style-name="表格104.A3" office:value-type="string">
            <text:p text:style-name="P15"><text:span text:style-name="T27">大家共用同一個頻道</text:span></text:p>
          </table:table-cell>
        </table:table-row>
        <table:table-row table:style-name="表格104.1">
          <table:table-cell table:style-name="表格104.A2" office:value-type="string">
            <text:p text:style-name="P15"><text:span text:style-name="T27">Collision Avoidance 碰撞避免</text:span></text:p>
          </table:table-cell>
          <table:table-cell table:style-name="表格104.A2" office:value-type="string">
            <text:p text:style-name="P15"><text:span text:style-name="T27">盡量「避免」訊號互撞（而非偵測後再處理）</text:span>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8"><text:span text:style-name="T33">📶 <text:s/></text:span><text:span text:style-name="T13">WiFi 高速基礎</text:span></text:p>
            <text:p text:style-name="P19"><text:span text:style-name="T28">另：OFDM（正交分頻多工）— 將資料分成多個子頻道同時傳輸，讓頻寬利用率大幅提升，是現代 WiFi 高速傳輸的基礎技術。</text:span>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8"><text:span text:style-name="T33">🚑 <text:s/></text:span><text:span text:style-name="T35">WiFi 的 QoS：EDCA</text:span></text:p>
            <text:p text:style-name="P19"><text:span text:style-name="T28">當很多人在搶頻道，某些資料（語音、視訊）需要優先通過，這就是 EDCA（Enhanced Distributed Channel Access）的功能。視訊通話/語音→少等、優先傳；網頁/大檔下載→稍微等一下也沒關係。</text:span></text:p>
            <text:p text:style-name="P20"><text:span text:style-name="T28">記憶口訣：WiFi = 急診室排隊制度（心臟病/語音視訊優先，小感冒/網頁下載等一下）。</text:span></text:p>
          </table:table-cell>
          <table:covered-table-cell/>
        </table:table-row>
      </table:table>
      <text:h text:style-name="P2" text:outline-level="2"><text:span text:style-name="T4">二、Bluetooth：老大排班（Master-Slave）</text:span></text:h>
      <text:p text:style-name="P24"><text:span text:style-name="T28">Bluetooth 不靠「搶」，而是由 Master 統一分配時間，Slave 照順序傳資料（0~1ms 耳機、1~2ms 滑鼠、2~3ms 鍵盤、3~4ms 再回耳機…）。</text:span>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8"><text:span text:style-name="T33">🔵 <text:s/></text:span><text:span text:style-name="T13">為什麼要排班？</text:span></text:p>
            <text:p text:style-name="P19"><text:span text:style-name="T28">因為藍牙裝置大多是「即時設備」，延遲太久就沒用了（耳機你說「你好」2 秒後才到→完蛋；滑鼠 1 秒後游標才動→無法使用）。因此 Bluetooth 保留固定時槽（Time Slot），確保即時性與穩定性。</text:span></text:p>
            <text:p text:style-name="P20"><text:span text:style-name="T28">記憶口訣：WiFi = 菜市場（自由競爭，亂搶）；Bluetooth = 公司會議室預約（固定排班，有秩序）。</text:span>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13"><text:span text:style-name="T22">即時語音</text:span></text:p>
          </table:table-cell>
          <table:table-cell table:style-name="表格105.A2" office:value-type="string">
            <text:p text:style-name="P13"><text:span text:style-name="T22">全名</text:span></text:p>
          </table:table-cell>
          <table:table-cell table:style-name="表格105.A2" office:value-type="string">
            <text:p text:style-name="P13"><text:span text:style-name="T22">說明</text:span></text:p>
          </table:table-cell>
          <table:table-cell table:style-name="表格105.A2" office:value-type="string">
            <text:p text:style-name="P13"><text:span text:style-name="T22">用途</text:span></text:p>
          </table:table-cell>
        </table:table-row>
        <table:table-row table:style-name="表格105.1">
          <table:table-cell table:style-name="表格105.A3" office:value-type="string">
            <text:p text:style-name="P15"><text:span text:style-name="T27">SCO</text:span></text:p>
          </table:table-cell>
          <table:table-cell table:style-name="表格105.A3" office:value-type="string">
            <text:p text:style-name="P15"><text:span text:style-name="T27">Synchronous Connection-Oriented</text:span></text:p>
          </table:table-cell>
          <table:table-cell table:style-name="表格105.A3" office:value-type="string">
            <text:p text:style-name="P15"><text:span text:style-name="T27">固定時槽、同步傳輸</text:span></text:p>
          </table:table-cell>
          <table:table-cell table:style-name="表格105.A3" office:value-type="string">
            <text:p text:style-name="P15"><text:span text:style-name="T27">藍牙耳機通話</text:span></text:p>
          </table:table-cell>
        </table:table-row>
        <table:table-row table:style-name="表格105.1">
          <table:table-cell table:style-name="表格105.A4" office:value-type="string">
            <text:p text:style-name="P15"><text:span text:style-name="T27">eSCO</text:span></text:p>
          </table:table-cell>
          <table:table-cell table:style-name="表格105.A4" office:value-type="string">
            <text:p text:style-name="P15"><text:span text:style-name="T27">Enhanced SCO</text:span></text:p>
          </table:table-cell>
          <table:table-cell table:style-name="表格105.A4" office:value-type="string">
            <text:p text:style-name="P15"><text:span text:style-name="T27">SCO 加強版、可重傳、品質更好</text:span></text:p>
          </table:table-cell>
          <table:table-cell table:style-name="表格105.A4" office:value-type="string">
            <text:p text:style-name="P15"><text:span text:style-name="T27">高品質語音</text:span>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8"><text:span text:style-name="T33">🔀 <text:s/></text:span><text:span text:style-name="T13">Bluetooth 抗干擾</text:span></text:p>
            <text:p text:style-name="P19"><text:span text:style-name="T28">另：FHSS（跳頻展頻）— 在 2.4GHz 頻段中每秒快速切換數百次（每秒約 1600 次）頻道，避免與其他設備干擾，提升穩定性。白話：「一直換頻道講話，干擾者跟不上」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4">三、深入理解：時槽（Time Slot）</text:span></text:h>
      <text:p text:style-name="P24"><text:span text:style-name="T28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span>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13"><text:span text:style-name="T25">三大好處</text:span></text:p>
            </table:table-cell>
            <table:table-cell table:style-name="表格106.A1" table:number-columns-spanned="2" office:value-type="string">
              <text:p text:style-name="P13"><text:span text:style-name="T25">說明</text:span></text:p>
            </table:table-cell>
            <table:covered-table-cell/>
            <table:table-cell table:style-name="表格106.A1" office:value-type="string">
              <text:p text:style-name="P13"><text:span text:style-name="T25">比喻</text:span>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15"><text:span text:style-name="T31">穩定不碰撞</text:span></text:p>
          </table:table-cell>
          <table:table-cell table:style-name="表格106.A2" table:number-columns-spanned="2" office:value-type="string">
            <text:p text:style-name="P15"><text:span text:style-name="T31">每人有專屬時間，不會互相干擾</text:span></text:p>
          </table:table-cell>
          <table:covered-table-cell/>
          <table:table-cell table:style-name="表格106.A2" office:value-type="string">
            <text:p text:style-name="P15"><text:span text:style-name="T31">公司會議室預約制</text:span></text:p>
          </table:table-cell>
        </table:table-row>
        <table:table-row table:style-name="表格106.1">
          <table:table-cell table:style-name="表格106.A3" office:value-type="string">
            <text:p text:style-name="P15"><text:span text:style-name="T31">即時性保證</text:span></text:p>
          </table:table-cell>
          <table:table-cell table:style-name="表格106.A3" table:number-columns-spanned="2" office:value-type="string">
            <text:p text:style-name="P15"><text:span text:style-name="T31">耳機每隔固定時間必定輪到，聲音不卡頓</text:span></text:p>
          </table:table-cell>
          <table:covered-table-cell/>
          <table:table-cell table:style-name="表格106.A3" office:value-type="string">
            <text:p text:style-name="P15"><text:span text:style-name="T31">醫院預約制，準時看診</text:span></text:p>
          </table:table-cell>
        </table:table-row>
        <table:table-row table:style-name="表格106.1">
          <table:table-cell table:style-name="表格106.A2" office:value-type="string">
            <text:p text:style-name="P15"><text:span text:style-name="T31">省電效果</text:span></text:p>
          </table:table-cell>
          <table:table-cell table:style-name="表格106.A2" table:number-columns-spanned="2" office:value-type="string">
            <text:p text:style-name="P15"><text:span text:style-name="T31">裝置知道「還沒輪到我」，可先休眠等待</text:span></text:p>
          </table:table-cell>
          <table:covered-table-cell/>
          <table:table-cell table:style-name="表格106.A2" office:value-type="string">
            <text:p text:style-name="P15"><text:span text:style-name="T31">等候室等叫號，先睡一下</text:span>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12"><text:span text:style-name="T22">WiFi 競爭制</text:span></text:p>
          </table:table-cell>
          <table:covered-table-cell/>
          <table:table-cell table:style-name="表格106.A1" table:number-columns-spanned="2" office:value-type="string">
            <text:p text:style-name="P12"><text:span text:style-name="T22">BT 時槽制</text:span>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15"><text:span text:style-name="T27">菜市場：大家自由搶。吞吐量高、速度快，但可能塞車、延遲不穩定。</text:span></text:p>
          </table:table-cell>
          <table:covered-table-cell/>
          <table:table-cell table:style-name="表格106.A2" table:number-columns-spanned="2" office:value-type="string">
            <text:p text:style-name="P15"><text:span text:style-name="T27">醫院預約制：輪流看診。延遲固定、穩定省電，但速度不如 WiFi 快。</text:span>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8"><text:span text:style-name="T33">🕐 <text:s/></text:span><text:span text:style-name="T49">考試定義（背起來）</text:span></text:p>
            <text:p text:style-name="P19"><text:span text:style-name="T28">Time Slot（時槽）＝將時間切成固定小區段，由不同裝置依序使用，避免碰撞並確保即時性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pan text:style-name="T4">四、WiFi vs Bluetooth 全面比較</text:span>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13"><text:span text:style-name="T22">項目</text:span></text:p>
            </table:table-cell>
            <table:table-cell table:style-name="表格107.A1" office:value-type="string">
              <text:p text:style-name="P13"><text:span text:style-name="T22">WiFi</text:span></text:p>
            </table:table-cell>
            <table:table-cell table:style-name="表格107.A1" office:value-type="string">
              <text:p text:style-name="P13"><text:span text:style-name="T22">Bluetooth</text:span>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15"><text:span text:style-name="T27">核心機制</text:span></text:p>
          </table:table-cell>
          <table:table-cell table:style-name="表格107.A2" office:value-type="string">
            <text:p text:style-name="P15"><text:span text:style-name="T27">CSMA/CA（先偵聽再傳）</text:span></text:p>
          </table:table-cell>
          <table:table-cell table:style-name="表格107.A2" office:value-type="string">
            <text:p text:style-name="P15"><text:span text:style-name="T27">Master-Slave（老大排班）</text:span></text:p>
          </table:table-cell>
        </table:table-row>
        <table:table-row table:style-name="表格107.1">
          <table:table-cell table:style-name="表格107.A3" office:value-type="string">
            <text:p text:style-name="P15"><text:span text:style-name="T27">即時語音 / QoS</text:span></text:p>
          </table:table-cell>
          <table:table-cell table:style-name="表格107.A3" office:value-type="string">
            <text:p text:style-name="P15"><text:span text:style-name="T27">EDCA（QoS 優先）</text:span></text:p>
          </table:table-cell>
          <table:table-cell table:style-name="表格107.A3" office:value-type="string">
            <text:p text:style-name="P15"><text:span text:style-name="T27">SCO / eSCO（藍牙即時語音）</text:span></text:p>
          </table:table-cell>
        </table:table-row>
        <table:table-row table:style-name="表格107.1">
          <table:table-cell table:style-name="表格107.A2" office:value-type="string">
            <text:p text:style-name="P15"><text:span text:style-name="T27">速度</text:span></text:p>
          </table:table-cell>
          <table:table-cell table:style-name="表格107.A2" office:value-type="string">
            <text:p text:style-name="P15"><text:span text:style-name="T27">高速（快）</text:span></text:p>
          </table:table-cell>
          <table:table-cell table:style-name="表格107.A2" office:value-type="string">
            <text:p text:style-name="P15"><text:span text:style-name="T27">較慢</text:span></text:p>
          </table:table-cell>
        </table:table-row>
        <table:table-row table:style-name="表格107.1">
          <table:table-cell table:style-name="表格107.A3" office:value-type="string">
            <text:p text:style-name="P15"><text:span text:style-name="T27">耗電量</text:span></text:p>
          </table:table-cell>
          <table:table-cell table:style-name="表格107.A3" office:value-type="string">
            <text:p text:style-name="P15"><text:span text:style-name="T27">較高</text:span></text:p>
          </table:table-cell>
          <table:table-cell table:style-name="表格107.A3" office:value-type="string">
            <text:p text:style-name="P15"><text:span text:style-name="T27">低功耗</text:span></text:p>
          </table:table-cell>
        </table:table-row>
        <table:table-row table:style-name="表格107.1">
          <table:table-cell table:style-name="表格107.A2" office:value-type="string">
            <text:p text:style-name="P15"><text:span text:style-name="T27">傳輸距離</text:span></text:p>
          </table:table-cell>
          <table:table-cell table:style-name="表格107.A2" office:value-type="string">
            <text:p text:style-name="P15"><text:span text:style-name="T27">較遠（數十~百公尺）</text:span></text:p>
          </table:table-cell>
          <table:table-cell table:style-name="表格107.A2" office:value-type="string">
            <text:p text:style-name="P15"><text:span text:style-name="T27">較短（約 10 公尺）</text:span></text:p>
          </table:table-cell>
        </table:table-row>
        <table:table-row table:style-name="表格107.1">
          <table:table-cell table:style-name="表格107.A3" office:value-type="string">
            <text:p text:style-name="P15"><text:span text:style-name="T27">穩定性</text:span></text:p>
          </table:table-cell>
          <table:table-cell table:style-name="表格107.A3" office:value-type="string">
            <text:p text:style-name="P15"><text:span text:style-name="T27">受干擾影響較大</text:span></text:p>
          </table:table-cell>
          <table:table-cell table:style-name="表格107.A3" office:value-type="string">
            <text:p text:style-name="P15"><text:span text:style-name="T27">固定時槽非常穩定</text:span></text:p>
          </table:table-cell>
        </table:table-row>
        <table:table-row table:style-name="表格107.1">
          <table:table-cell table:style-name="表格107.A2" office:value-type="string">
            <text:p text:style-name="P15"><text:span text:style-name="T27">適用場景</text:span></text:p>
          </table:table-cell>
          <table:table-cell table:style-name="表格107.A2" office:value-type="string">
            <text:p text:style-name="P15"><text:span text:style-name="T27">上網、看影片、大檔下載</text:span></text:p>
          </table:table-cell>
          <table:table-cell table:style-name="表格107.A2" office:value-type="string">
            <text:p text:style-name="P15"><text:span text:style-name="T27">耳機、滑鼠、鍵盤、通話</text:span></text:p>
          </table:table-cell>
        </table:table-row>
      </table:table>
      <text:h text:style-name="P2" text:outline-level="2"><text:span text:style-name="T4">五、L2CAP：藍牙的資料管理員</text:span></text:h>
      <text:p text:style-name="P24"><text:span text:style-name="T28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13"><text:span text:style-name="T25">三種邏輯通道</text:span></text:p>
            </table:table-cell>
            <table:table-cell table:style-name="表格108.A1" table:number-columns-spanned="2" office:value-type="string">
              <text:p text:style-name="P13"><text:span text:style-name="T25">特性</text:span></text:p>
            </table:table-cell>
            <table:covered-table-cell/>
            <table:table-cell table:style-name="表格108.A1" office:value-type="string">
              <text:p text:style-name="P13"><text:span text:style-name="T25">用途</text:span>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15"><text:span text:style-name="T31">Connection-oriented（連線導向）</text:span></text:p>
          </table:table-cell>
          <table:table-cell table:style-name="表格108.A2" table:number-columns-spanned="2" office:value-type="string">
            <text:p text:style-name="P15"><text:span text:style-name="T31">有建立連線、雙方確認，可靠、確保收到</text:span></text:p>
          </table:table-cell>
          <table:covered-table-cell/>
          <table:table-cell table:style-name="表格108.A2" office:value-type="string">
            <text:p text:style-name="P15"><text:span text:style-name="T31">重要資料傳輸、檔案（像打電話）</text:span></text:p>
          </table:table-cell>
        </table:table-row>
        <table:table-row table:style-name="表格108.1">
          <table:table-cell table:style-name="表格108.A3" office:value-type="string">
            <text:p text:style-name="P15"><text:span text:style-name="T31">Connectionless（非連線）</text:span></text:p>
          </table:table-cell>
          <table:table-cell table:style-name="表格108.A3" table:number-columns-spanned="2" office:value-type="string">
            <text:p text:style-name="P15"><text:span text:style-name="T31">直接送出、不確認，快速但可能遺失</text:span></text:p>
          </table:table-cell>
          <table:covered-table-cell/>
          <table:table-cell table:style-name="表格108.A3" office:value-type="string">
            <text:p text:style-name="P15"><text:span text:style-name="T31">廣播、串流（像廣播）</text:span></text:p>
          </table:table-cell>
        </table:table-row>
        <table:table-row table:style-name="表格108.1">
          <table:table-cell table:style-name="表格108.A2" office:value-type="string">
            <text:p text:style-name="P15"><text:span text:style-name="T31">Signaling Channel（信令通道）</text:span></text:p>
          </table:table-cell>
          <table:table-cell table:style-name="表格108.A2" table:number-columns-spanned="2" office:value-type="string">
            <text:p text:style-name="P15"><text:span text:style-name="T31">控制管理用，不傳資料只管控制</text:span></text:p>
          </table:table-cell>
          <table:covered-table-cell/>
          <table:table-cell table:style-name="表格108.A2" office:value-type="string">
            <text:p text:style-name="P15"><text:span text:style-name="T31">建立/釋放連線、管理參數（像總控室）</text:span>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13"><text:span text:style-name="T22">OSI 層</text:span></text:p>
          </table:table-cell>
          <table:covered-table-cell/>
          <table:table-cell table:style-name="表格108.A1" table:number-columns-spanned="2" office:value-type="string">
            <text:p text:style-name="P13"><text:span text:style-name="T22">藍牙對應</text:span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15"><text:span text:style-name="T27">應用層 Application</text:span></text:p>
          </table:table-cell>
          <table:covered-table-cell/>
          <table:table-cell table:style-name="表格108.A2" table:number-columns-spanned="2" office:value-type="string">
            <text:p text:style-name="P15"><text:span text:style-name="T27">App / 語音 / 檔案傳輸</text:span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15"><text:span text:style-name="T27">傳輸層 Transport</text:span></text:p>
          </table:table-cell>
          <table:covered-table-cell/>
          <table:table-cell table:style-name="表格108.A3" table:number-columns-spanned="2" office:value-type="string">
            <text:p text:style-name="P15"><text:span text:style-name="T27">部分功能在 L2CAP（資料分段與重組）</text:span>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15"><text:span text:style-name="T27">網路層 Network</text:span></text:p>
          </table:table-cell>
          <table:covered-table-cell/>
          <table:table-cell table:style-name="表格108.A2" table:number-columns-spanned="2" office:value-type="string">
            <text:p text:style-name="P15"><text:span text:style-name="T27">（幾乎不對應，藍牙無路由概念）</text:span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15"><text:span text:style-name="T27">資料鏈結層 Data Link</text:span></text:p>
          </table:table-cell>
          <table:covered-table-cell/>
          <table:table-cell table:style-name="表格108.A3" table:number-columns-spanned="2" office:value-type="string">
            <text:p text:style-name="P15"><text:span text:style-name="T27">L2CAP / MAC 排程（通道管理、時槽排程）</text:span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15"><text:span text:style-name="T27">實體層 Physical</text:span></text:p>
          </table:table-cell>
          <table:covered-table-cell/>
          <table:table-cell table:style-name="表格108.A2" table:number-columns-spanned="2" office:value-type="string">
            <text:p text:style-name="P15"><text:span text:style-name="T27">無線電波（2.4GHz）</text:span>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8"><text:span text:style-name="T33">📐 <text:s/></text:span><text:span text:style-name="T39">重要</text:span></text:p>
            <text:p text:style-name="P19"><text:span text:style-name="T28">L2CAP 主要位於「資料鏈結層（Data Link Layer）」，這是考試常考的知識點！</text:span></text:p>
          </table:table-cell>
          <table:covered-table-cell/>
          <table:covered-table-cell/>
          <table:covered-table-cell/>
        </table:table-row>
      </table:table>
      <text:h text:style-name="P2" text:outline-level="2"><text:span text:style-name="T4">六、本篇考試陷阱整理</text:span>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9"><text:span text:style-name="T29">WiFi 用什麼避免碰撞？　</text:span><text:span text:style-name="T28">✗ CSMA/CD（有線乙太網路機制）→ ✓ CSMA/CA（WiFi 用「避免」碰撞，不是「偵測」）。口訣：有線 Ethernet = CD（Detect），無線 WiFi = CA（Avoid）。</text:span></text:p>
            <text:p text:style-name="P20"><text:span text:style-name="T29">Bluetooth 是競爭制還是排程制？　</text:span><text:span text:style-name="T28">✓ 排程制（Master-Slave，老大安排時槽），不是競爭制。</text:span></text:p>
            <text:p text:style-name="P20"><text:span text:style-name="T29">藍牙即時語音用什麼？　</text:span><text:span text:style-name="T28">✓ SCO（同步連線）或 eSCO（加強版，可重傳）。</text:span></text:p>
            <text:p text:style-name="P20"><text:span text:style-name="T29">L2CAP 控制管理用哪個通道？　</text:span><text:span text:style-name="T28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18"><text:span text:style-name="T33">⏱ <text:s/></text:span><text:span text:style-name="T49">考前 30 秒濃縮</text:span></text:p>
            <text:p text:style-name="P19"><text:span text:style-name="T28">WiFi＝搶頻道 · BT＝排班 · 時槽＝時間格子 · SCO＝語音 · L2CAP＝三通道（位於 Data Link 層）。</text:span></text:p>
          </table:table-cell>
        </table:table-row>
      </table:table>
      <text:h text:style-name="P1" text:outline-level="1"><text:span text:style-name="T23">第 十 篇　資訊安全：設備防護 · 攻防解析 · 企業資安 · Zero Trust</text:span>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8"><text:span text:style-name="T33">🛡️ <text:s/></text:span><text:span text:style-name="T10">本篇地圖</text:span></text:p>
            <text:p text:style-name="P19"><text:span text:style-name="T28">本篇是全書最大主題，分六大部分：① 防護設備（FW/WAF/NGFW/DMZ/IOC/Proxy）；② SQL Injection 與 Zero-Day 攻防；③ Firewall/IDS/IPS/SNMP/ICMP；④ 企業資安三階段；⑤ EDR/MDR/MITRE ATT&amp;CK/數位韌性；⑥ Zero Trust 零信任。</text:span></text:p>
          </table:table-cell>
        </table:table-row>
      </table:table>
      <text:h text:style-name="P2" text:outline-level="2"><text:span text:style-name="T4">壹、資安與網路設備：FW · WAF · NGFW · DMZ · IOC · Proxy</text:span></text:h>
      <text:p text:style-name="P24"><text:span text:style-name="T28">想像你家是一間公司：外面是危險的 Internet，裡面是存放重要資料的內部網路，中間需要多層防護機制層層把關。</text:span>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13"><text:span text:style-name="T22">名詞</text:span></text:p>
            </table:table-cell>
            <table:table-cell table:style-name="表格111.A1" office:value-type="string">
              <text:p text:style-name="P13"><text:span text:style-name="T22">一行說明</text:span>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15"><text:span text:style-name="T27">FW</text:span></text:p>
          </table:table-cell>
          <table:table-cell table:style-name="表格111.A2" office:value-type="string">
            <text:p text:style-name="P15"><text:span text:style-name="T27">傳統防火牆，只看封包「外面」的 IP、Port、Protocol</text:span></text:p>
          </table:table-cell>
        </table:table-row>
        <table:table-row table:style-name="表格111.1">
          <table:table-cell table:style-name="表格111.A3" office:value-type="string">
            <text:p text:style-name="P15"><text:span text:style-name="T27">WAF</text:span></text:p>
          </table:table-cell>
          <table:table-cell table:style-name="表格111.A3" office:value-type="string">
            <text:p text:style-name="P15"><text:span text:style-name="T27">網站應用防火牆，會打開封包「裡面」，防 SQL Injection、XSS</text:span></text:p>
          </table:table-cell>
        </table:table-row>
        <table:table-row table:style-name="表格111.1">
          <table:table-cell table:style-name="表格111.A2" office:value-type="string">
            <text:p text:style-name="P15"><text:span text:style-name="T27">NGFW</text:span></text:p>
          </table:table-cell>
          <table:table-cell table:style-name="表格111.A2" office:value-type="string">
            <text:p text:style-name="P15"><text:span text:style-name="T27">次世代防火牆，比 FW 更聰明，有 DPI 深度檢查、IPS、App 識別</text:span></text:p>
          </table:table-cell>
        </table:table-row>
        <table:table-row table:style-name="表格111.1">
          <table:table-cell table:style-name="表格111.A3" office:value-type="string">
            <text:p text:style-name="P15"><text:span text:style-name="T27">DMZ</text:span></text:p>
          </table:table-cell>
          <table:table-cell table:style-name="表格111.A3" office:value-type="string">
            <text:p text:style-name="P15"><text:span text:style-name="T27">隔離區，把對外服務（Web、Mail）放這裡，就算被駭也不傷內部</text:span></text:p>
          </table:table-cell>
        </table:table-row>
        <table:table-row table:style-name="表格111.1">
          <table:table-cell table:style-name="表格111.A2" office:value-type="string">
            <text:p text:style-name="P15"><text:span text:style-name="T27">IOC</text:span></text:p>
          </table:table-cell>
          <table:table-cell table:style-name="表格111.A2" office:value-type="string">
            <text:p text:style-name="P15"><text:span text:style-name="T27">入侵指標（攻擊事後證據）：Domain（網）、Hash（檔）、IP（連）、C2（控）</text:span></text:p>
          </table:table-cell>
        </table:table-row>
        <table:table-row table:style-name="表格111.1">
          <table:table-cell table:style-name="表格111.A3" office:value-type="string">
            <text:p text:style-name="P15"><text:span text:style-name="T27">Proxy</text:span></text:p>
          </table:table-cell>
          <table:table-cell table:style-name="表格111.A3" office:value-type="string">
            <text:p text:style-name="P15"><text:span text:style-name="T27">正向代理，幫「使用者（Client）」隱藏 IP、快取內容</text:span></text:p>
          </table:table-cell>
        </table:table-row>
        <table:table-row table:style-name="表格111.1">
          <table:table-cell table:style-name="表格111.A2" office:value-type="string">
            <text:p text:style-name="P15"><text:span text:style-name="T27">Reverse Proxy</text:span></text:p>
          </table:table-cell>
          <table:table-cell table:style-name="表格111.A2" office:value-type="string">
            <text:p text:style-name="P15"><text:span text:style-name="T27">反向代理，幫「伺服器（Server）」負載平衡、隱藏主機</text:span></text:p>
          </table:table-cell>
        </table:table-row>
      </table:table>
      <text:h text:style-name="P3" text:outline-level="3"><text:span text:style-name="T34">▍</text:span><text:span text:style-name="T35"> 防火牆 Firewall（FW）</text:span></text:h>
      <text:p text:style-name="P24"><text:span text:style-name="T28">最基本的網路防護設備，像公司門口的警衛。只看封包的「外部資訊」：IP 位址（來者是誰）、Port（從哪個門進來）、Protocol（什麼類型）。主要運作在 L3（網路層）與 L4（傳輸層）。</text:span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8"><text:span text:style-name="T33">⚠️ <text:s/></text:span><text:span text:style-name="T39">缺點</text:span></text:p>
            <text:p text:style-name="P19"><text:span text:style-name="T28">FW 只看外面，不看封包裡面的內容，無法防止應用層攻擊（如 SQL Injection）。</text:span></text:p>
          </table:table-cell>
        </table:table-row>
      </table:table>
      <text:h text:style-name="P3" text:outline-level="3"><text:span text:style-name="T34">▍</text:span><text:span text:style-name="T35"> 網站應用防火牆 WAF</text:span></text:h>
      <text:p text:style-name="P24"><text:span text:style-name="T28">進階版防護，會「打開包包檢查內容」，專門防禦網站層面的攻擊：SQL Injection（注入惡意 SQL 竊取資料庫）、XSS（插入惡意 JavaScript）、其他 HTTP 層攻擊（CSRF、Path Traversal）。</text:span>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13"><text:span text:style-name="T22">比較項目</text:span></text:p>
            </table:table-cell>
            <table:table-cell table:style-name="表格113.A1" office:value-type="string">
              <text:p text:style-name="P13"><text:span text:style-name="T22">FW</text:span></text:p>
            </table:table-cell>
            <table:table-cell table:style-name="表格113.A1" office:value-type="string">
              <text:p text:style-name="P13"><text:span text:style-name="T22">WAF</text:span>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15"><text:span text:style-name="T27">檢查範圍</text:span></text:p>
          </table:table-cell>
          <table:table-cell table:style-name="表格113.A2" office:value-type="string">
            <text:p text:style-name="P15"><text:span text:style-name="T27">封包外面（IP/Port）</text:span></text:p>
          </table:table-cell>
          <table:table-cell table:style-name="表格113.A2" office:value-type="string">
            <text:p text:style-name="P15"><text:span text:style-name="T27">封包裡面（HTTP 內容）</text:span></text:p>
          </table:table-cell>
        </table:table-row>
        <table:table-row table:style-name="表格113.1">
          <table:table-cell table:style-name="表格113.A3" office:value-type="string">
            <text:p text:style-name="P15"><text:span text:style-name="T27">OSI 分層</text:span></text:p>
          </table:table-cell>
          <table:table-cell table:style-name="表格113.A3" office:value-type="string">
            <text:p text:style-name="P15"><text:span text:style-name="T27">L3 / L4</text:span></text:p>
          </table:table-cell>
          <table:table-cell table:style-name="表格113.A3" office:value-type="string">
            <text:p text:style-name="P15"><text:span text:style-name="T27">L7（應用層）</text:span></text:p>
          </table:table-cell>
        </table:table-row>
        <table:table-row table:style-name="表格113.1">
          <table:table-cell table:style-name="表格113.A2" office:value-type="string">
            <text:p text:style-name="P15"><text:span text:style-name="T27">防禦 SQL Injection</text:span></text:p>
          </table:table-cell>
          <table:table-cell table:style-name="表格113.A2" office:value-type="string">
            <text:p text:style-name="P15"><text:span text:style-name="T27">✗ 無法</text:span></text:p>
          </table:table-cell>
          <table:table-cell table:style-name="表格113.A2" office:value-type="string">
            <text:p text:style-name="P15"><text:span text:style-name="T27">○ 可以</text:span></text:p>
          </table:table-cell>
        </table:table-row>
        <table:table-row table:style-name="表格113.1">
          <table:table-cell table:style-name="表格113.A3" office:value-type="string">
            <text:p text:style-name="P15"><text:span text:style-name="T27">防禦 XSS</text:span></text:p>
          </table:table-cell>
          <table:table-cell table:style-name="表格113.A3" office:value-type="string">
            <text:p text:style-name="P15"><text:span text:style-name="T27">✗ 無法</text:span></text:p>
          </table:table-cell>
          <table:table-cell table:style-name="表格113.A3" office:value-type="string">
            <text:p text:style-name="P15"><text:span text:style-name="T27">○ 可以</text:span></text:p>
          </table:table-cell>
        </table:table-row>
      </table:table>
      <text:h text:style-name="P3" text:outline-level="3"><text:span text:style-name="T34">▍</text:span><text:span text:style-name="T35"> 次世代防火牆 NGFW</text:span></text:h>
      <text:p text:style-name="P24"><text:span text:style-name="T28">在傳統 FW 基礎上大幅強化：DPI（深度封包檢測）、IPS（入侵防禦）、App 識別（知道你在用 LINE 還是 YouTube）、使用者身份識別。</text:span>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B"/>
        <table:table-header-rows>
          <text:soft-page-break/>
          <table:table-row table:style-name="表格114.1">
            <table:table-cell table:style-name="表格114.A1" office:value-type="string">
              <text:p text:style-name="P12"><text:span text:style-name="T22">能力</text:span></text:p>
            </table:table-cell>
            <table:table-cell table:style-name="表格114.A1" office:value-type="string">
              <text:p text:style-name="P12"><text:span text:style-name="T22">FW</text:span></text:p>
            </table:table-cell>
            <table:table-cell table:style-name="表格114.A1" office:value-type="string">
              <text:p text:style-name="P12"><text:span text:style-name="T22">WAF</text:span></text:p>
            </table:table-cell>
            <table:table-cell table:style-name="表格114.A1" office:value-type="string">
              <text:p text:style-name="P12"><text:span text:style-name="T22">NGFW</text:span>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15"><text:span text:style-name="T27">IP/Port 過濾</text:span></text:p>
          </table:table-cell>
          <table:table-cell table:style-name="表格114.A2" office:value-type="string">
            <text:p text:style-name="P14"><text:span text:style-name="T44">○</text:span></text:p>
          </table:table-cell>
          <table:table-cell table:style-name="表格114.A2" office:value-type="string">
            <text:p text:style-name="P14"><text:span text:style-name="T44">○</text:span></text:p>
          </table:table-cell>
          <table:table-cell table:style-name="表格114.A2" office:value-type="string">
            <text:p text:style-name="P14"><text:span text:style-name="T44">○</text:span></text:p>
          </table:table-cell>
        </table:table-row>
        <table:table-row table:style-name="表格114.1">
          <table:table-cell table:style-name="表格114.A3" office:value-type="string">
            <text:p text:style-name="P15"><text:span text:style-name="T27">HTTP 內容檢查</text:span></text:p>
          </table:table-cell>
          <table:table-cell table:style-name="表格114.A3" office:value-type="string">
            <text:p text:style-name="P14"><text:span text:style-name="T42">✗</text:span></text:p>
          </table:table-cell>
          <table:table-cell table:style-name="表格114.A3" office:value-type="string">
            <text:p text:style-name="P14"><text:span text:style-name="T44">○</text:span></text:p>
          </table:table-cell>
          <table:table-cell table:style-name="表格114.A3" office:value-type="string">
            <text:p text:style-name="P14"><text:span text:style-name="T44">○</text:span></text:p>
          </table:table-cell>
        </table:table-row>
        <table:table-row table:style-name="表格114.1">
          <table:table-cell table:style-name="表格114.A2" office:value-type="string">
            <text:p text:style-name="P15"><text:span text:style-name="T27">DPI 深度檢查</text:span></text:p>
          </table:table-cell>
          <table:table-cell table:style-name="表格114.A2" office:value-type="string">
            <text:p text:style-name="P14"><text:span text:style-name="T42">✗</text:span></text:p>
          </table:table-cell>
          <table:table-cell table:style-name="表格114.A2" office:value-type="string">
            <text:p text:style-name="P14"><text:span text:style-name="T42">✗</text:span></text:p>
          </table:table-cell>
          <table:table-cell table:style-name="表格114.A2" office:value-type="string">
            <text:p text:style-name="P14"><text:span text:style-name="T44">○</text:span></text:p>
          </table:table-cell>
        </table:table-row>
        <table:table-row table:style-name="表格114.1">
          <table:table-cell table:style-name="表格114.A3" office:value-type="string">
            <text:p text:style-name="P15"><text:span text:style-name="T27">App 識別</text:span></text:p>
          </table:table-cell>
          <table:table-cell table:style-name="表格114.A3" office:value-type="string">
            <text:p text:style-name="P14"><text:span text:style-name="T42">✗</text:span></text:p>
          </table:table-cell>
          <table:table-cell table:style-name="表格114.A3" office:value-type="string">
            <text:p text:style-name="P14"><text:span text:style-name="T42">✗</text:span></text:p>
          </table:table-cell>
          <table:table-cell table:style-name="表格114.A3" office:value-type="string">
            <text:p text:style-name="P14"><text:span text:style-name="T44">○</text:span></text:p>
          </table:table-cell>
        </table:table-row>
        <table:table-row table:style-name="表格114.1">
          <table:table-cell table:style-name="表格114.A2" office:value-type="string">
            <text:p text:style-name="P15"><text:span text:style-name="T27">IPS 入侵防禦</text:span></text:p>
          </table:table-cell>
          <table:table-cell table:style-name="表格114.A2" office:value-type="string">
            <text:p text:style-name="P14"><text:span text:style-name="T42">✗</text:span></text:p>
          </table:table-cell>
          <table:table-cell table:style-name="表格114.A2" office:value-type="string">
            <text:p text:style-name="P14"><text:span text:style-name="T42">✗</text:span></text:p>
          </table:table-cell>
          <table:table-cell table:style-name="表格114.A2" office:value-type="string">
            <text:p text:style-name="P14"><text:span text:style-name="T44">○</text:span>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8"><text:span text:style-name="T33">💡 <text:s/></text:span><text:span text:style-name="T35">實務說明</text:span></text:p>
            <text:p text:style-name="P19"><text:span text:style-name="T28">NGFW 在現代企業通常用來「取代」傳統 FW，而非兩者並用。功能越全面，一台就夠了。</text:span>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34">▍</text:span><text:span text:style-name="T35"> DMZ（非軍事區 / 隔離區）</text:span></text:h>
      <text:p text:style-name="P24"><text:span text:style-name="T28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span>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8"><text:span text:style-name="T33">⚠️ <text:s/></text:span><text:span text:style-name="T39">考試陷阱</text:span></text:p>
            <text:p text:style-name="P19"><text:span text:style-name="T28">DMZ 的用途是「隔離保護」（就算 DMZ 內伺服器被駭，駭客也無法直接進入內部網路），不是提升速度，也不是加密資料！</text:span></text:p>
          </table:table-cell>
        </table:table-row>
      </table:table>
      <text:h text:style-name="P3" text:outline-level="3"><text:span text:style-name="T34">▍</text:span><text:span text:style-name="T35"> IOC（入侵指標）</text:span></text:h>
      <text:p text:style-name="P24"><text:span text:style-name="T28">IOC（Indicator of Compromise）是「攻擊發生後所留下的已知痕跡與線索」，就像警察辦案蒐集到的通緝資料（車牌、電話、指紋、藏身處）。</text:span>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8"><text:span text:style-name="T33">🎯 <text:s/></text:span><text:span text:style-name="T49">核心觀念</text:span></text:p>
            <text:p text:style-name="P19"><text:span text:style-name="T28">IOC 是「已發生攻擊的事後證據」，不是用來預測未來攻擊的工具！這點非常容易考錯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12"><text:span text:style-name="T25">口訣</text:span></text:p>
          </table:table-cell>
          <table:table-cell table:style-name="表格116.A2" office:value-type="string">
            <text:p text:style-name="P12"><text:span text:style-name="T25">IOC 類型</text:span></text:p>
          </table:table-cell>
          <table:table-cell table:style-name="表格116.A2" office:value-type="string">
            <text:p text:style-name="P12"><text:span text:style-name="T25">白話說明</text:span></text:p>
          </table:table-cell>
          <table:table-cell table:style-name="表格116.A2" office:value-type="string">
            <text:p text:style-name="P12"><text:span text:style-name="T25">對應防禦工具</text:span></text:p>
          </table:table-cell>
        </table:table-row>
        <table:table-row table:style-name="表格116.1">
          <table:table-cell table:style-name="表格116.A3" office:value-type="string">
            <text:p text:style-name="P14"><text:span text:style-name="T48">網</text:span></text:p>
          </table:table-cell>
          <table:table-cell table:style-name="表格116.A3" office:value-type="string">
            <text:p text:style-name="P15"><text:span text:style-name="T31">惡意 Domain（網域）</text:span></text:p>
          </table:table-cell>
          <table:table-cell table:style-name="表格116.A3" office:value-type="string">
            <text:p text:style-name="P15"><text:span text:style-name="T31">釣魚網站網址，用來騙帳密、假冒正規網站</text:span></text:p>
          </table:table-cell>
          <table:table-cell table:style-name="表格116.A3" office:value-type="string">
            <text:p text:style-name="P15"><text:span text:style-name="T31">DNS 伺服器（封鎖惡意網域）</text:span></text:p>
          </table:table-cell>
        </table:table-row>
        <table:table-row table:style-name="表格116.1">
          <table:table-cell table:style-name="表格116.A4" office:value-type="string">
            <text:p text:style-name="P14"><text:span text:style-name="T48">檔</text:span></text:p>
          </table:table-cell>
          <table:table-cell table:style-name="表格116.A4" office:value-type="string">
            <text:p text:style-name="P15"><text:span text:style-name="T31">惡意 Hash（雜湊值）</text:span></text:p>
          </table:table-cell>
          <table:table-cell table:style-name="表格116.A4" office:value-type="string">
            <text:p text:style-name="P15"><text:span text:style-name="T31">惡意程式的唯一特徵碼，改檔名也能識別</text:span></text:p>
          </table:table-cell>
          <table:table-cell table:style-name="表格116.A4" office:value-type="string">
            <text:p text:style-name="P15"><text:span text:style-name="T31">防毒軟體 AV（比對特徵碼）</text:span></text:p>
          </table:table-cell>
        </table:table-row>
        <table:table-row table:style-name="表格116.1">
          <table:table-cell table:style-name="表格116.A3" office:value-type="string">
            <text:p text:style-name="P14"><text:span text:style-name="T48">連</text:span></text:p>
          </table:table-cell>
          <table:table-cell table:style-name="表格116.A3" office:value-type="string">
            <text:p text:style-name="P15"><text:span text:style-name="T31">惡意 IP 位址</text:span></text:p>
          </table:table-cell>
          <table:table-cell table:style-name="表格116.A3" office:value-type="string">
            <text:p text:style-name="P15"><text:span text:style-name="T31">感染後電腦對外異常連線的目標</text:span></text:p>
          </table:table-cell>
          <table:table-cell table:style-name="表格116.A3" office:value-type="string">
            <text:p text:style-name="P15"><text:span text:style-name="T31">防火牆 FW / NGFW（封鎖 IP）</text:span></text:p>
          </table:table-cell>
        </table:table-row>
        <table:table-row table:style-name="表格116.1">
          <table:table-cell table:style-name="表格116.A4" office:value-type="string">
            <text:p text:style-name="P14"><text:span text:style-name="T48">控</text:span></text:p>
          </table:table-cell>
          <table:table-cell table:style-name="表格116.A4" office:value-type="string">
            <text:p text:style-name="P15"><text:span text:style-name="T31">C2 Server（指揮控制）</text:span></text:p>
          </table:table-cell>
          <table:table-cell table:style-name="表格116.A4" office:value-type="string">
            <text:p text:style-name="P15"><text:span text:style-name="T31">駭客遠端操控被感染主機的總部</text:span></text:p>
          </table:table-cell>
          <table:table-cell table:style-name="表格116.A4" office:value-type="string">
            <text:p text:style-name="P15"><text:span text:style-name="T31">SIEM / IDS（偵測異常連線）</text:span>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18"><text:span text:style-name="T33">▸ <text:s/></text:span><text:span text:style-name="T10">攻擊全流程（IOC 出現在哪裡？）</text:span></text:p>
            <text:p text:style-name="P19"><text:span text:style-name="T28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8"><text:span text:style-name="T33">⚡ <text:s/></text:span><text:span text:style-name="T35">10 秒口訣速記</text:span></text:p>
            <text:p text:style-name="P19"><text:span text:style-name="T28">網騙你（Domain）→ 檔害你（Hash）→ 連出去（IP）→ 被控制（C2）。口訣：「網 → 檔 → 連 → 控」。</text:span></text:p>
          </table:table-cell>
          <table:covered-table-cell/>
          <table:covered-table-cell/>
          <table:covered-table-cell/>
        </table:table-row>
      </table:table>
      <text:h text:style-name="P3" text:outline-level="3"><text:soft-page-break/><text:span text:style-name="T34">▍</text:span><text:span text:style-name="T35"> Proxy 與 Reverse Proxy</text:span></text:h>
      <table:table table:name="表格117" table:style-name="表格117">
        <table:table-column table:style-name="表格117.A"/>
        <table:table-column table:style-name="表格117.B"/>
        <table:table-header-rows>
          <table:table-row table:style-name="表格117.1">
            <table:table-cell table:style-name="表格117.A1" office:value-type="string">
              <text:p text:style-name="P12"><text:span text:style-name="T22">🧍 Proxy（正向代理）— 幫 Client</text:span></text:p>
            </table:table-cell>
            <table:table-cell table:style-name="表格117.A1" office:value-type="string">
              <text:p text:style-name="P12"><text:span text:style-name="T22">🏢 Reverse Proxy（反向代理）— 幫 Server</text:span>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15"><text:span text:style-name="T27">流程：你 → Proxy → 網站。隱藏使用者真實 IP、Cache 加速、企業控管員工能存取哪些網站。比喻：你請朋友幫你買東西，店家不知道真正買家是你。</text:span></text:p>
          </table:table-cell>
          <table:table-cell table:style-name="表格117.A2" office:value-type="string">
            <text:p text:style-name="P15"><text:span text:style-name="T27">流程：你 → Reverse Proxy → 真正 Server。負載平衡、隱藏後端伺服器、SSL 終止與安全防護。比喻：公司大廳接待員分流訪客，客人不知道真正辦公室在哪層。</text:span></text:p>
          </table:table-cell>
        </table:table-row>
      </table:table>
      <text:h text:style-name="P3" text:outline-level="3"><text:span text:style-name="T34">▍</text:span><text:span text:style-name="T35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8"><text:span text:style-name="T33">🚧 <text:s/></text:span><text:span text:style-name="T10">封包闖關順序</text:span></text:p>
            <text:p text:style-name="P19"><text:span text:style-name="T28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span></text:p>
            <text:p text:style-name="P20"><text:span text:style-name="T28">📌 越後面代表越核心、越重要，每一層都是一道關卡，讓駭客越來越難突破。</text:span></text:p>
          </table:table-cell>
        </table:table-row>
        <table:table-row table:style-name="表格118.1">
          <table:table-cell table:style-name="表格118.A2" office:value-type="string">
            <text:p text:style-name="P18"><text:span text:style-name="T33">🔑 <text:s/></text:span><text:span text:style-name="T49">萬用口訣</text:span></text:p>
            <text:p text:style-name="P19"><text:span text:style-name="T28">FW 封外、WAF 看內、NGFW 最強、DMZ 隔離、IOC 壞人、Proxy 幫客、Reverse 幫服。</text:span></text:p>
          </table:table-cell>
        </table:table-row>
      </table:table>
      <text:h text:style-name="P2" text:outline-level="2"><text:span text:style-name="T4">貳、SQL Injection × Zero-Day × 防禦機制</text:span></text:h>
      <text:h text:style-name="P3" text:outline-level="3"><text:span text:style-name="T34">▍</text:span><text:span text:style-name="T35"> SQL Injection（SQL 注入攻擊）</text:span></text:h>
      <text:p text:style-name="P24"><text:span text:style-name="T28">當你在登入頁輸入帳密，後端會把輸入組合成 SQL 送到資料庫查詢，例如：SELECT * FROM users WHERE account='john' AND password='1234'。</text:span>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8"><text:span text:style-name="T33">💉 <text:s/></text:span><text:span text:style-name="T39">什麼是 SQL Injection？</text:span></text:p>
            <text:p text:style-name="P19"><text:span text:style-name="T38">核心一句話：</text:span><text:span text:style-name="T28">把原本只是「資料」的輸入，惡意改造成可執行的「SQL 指令」。</text:span></text:p>
            <text:p text:style-name="P20"><text:span text:style-name="T28">駭客在帳號欄位輸入：' OR 1=1 --，拼入後變成：…WHERE account='' OR 1=1 -- ' AND password='1234'。</text:span></text:p>
            <text:p text:style-name="P20"><text:span text:style-name="T28">OR 1=1 永遠成立 → 查出所有使用者；-- 是 SQL 單行註解 → 後面的密碼驗證被忽略。</text:span>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12"><text:span text:style-name="T22">❌ 攻擊成功的原因</text:span></text:p>
          </table:table-cell>
          <table:covered-table-cell/>
          <table:table-cell table:style-name="表格119.A2" office:value-type="string">
            <text:p text:style-name="P12"><text:span text:style-name="T22">✅ 正確的設計應該要</text:span>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15"><text:span text:style-name="T27">① OR 1=1 永遠成立，回傳全部使用者 ② -- 把密碼驗證段註解掉 ③ 工程師直接用字串拼接組 SQL，沒有驗證輸入</text:span></text:p>
          </table:table-cell>
          <table:covered-table-cell/>
          <table:table-cell table:style-name="表格119.A3" office:value-type="string">
            <text:p text:style-name="P15"><text:span text:style-name="T27">把使用者輸入視為「純資料」，不允許改變 SQL 結構；SQL 骨架固定，不因任何輸入而改變；使用 Prepared Statement</text:span>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8"><text:span text:style-name="T33">🛡️ <text:s/></text:span><text:span text:style-name="T45">防禦核心：Prepared Statement（預備語句）</text:span></text:p>
            <text:p text:style-name="P19"><text:span text:style-name="T46">概念：</text:span><text:span text:style-name="T28">先把 SQL 骨架「鎖死」，使用者只能填入資料，完全無法修改 SQL 結構。</text:span></text:p>
            <text:p text:style-name="P20"><text:span text:style-name="T28">❌ 危險寫法（字串拼接）：sql = "SELECT * FROM users WHERE id='" + input + "'"；輸入 ' OR 1=1 -- → 結構被竄改。</text:span></text:p>
            <text:p text:style-name="P20"><text:span text:style-name="T28">✅ 安全寫法：String sql = "SELECT * FROM users WHERE id=?"；? 是佔位符，input 被視為純文字，' OR 1=1 -- 完全無效。</text:span>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13"><text:span text:style-name="T25">輔助防禦手段</text:span></text:p>
          </table:table-cell>
          <table:table-cell table:style-name="表格119.A2" table:number-columns-spanned="2" office:value-type="string">
            <text:p text:style-name="P13"><text:span text:style-name="T25">說明</text:span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15"><text:span text:style-name="T31">Prepared Statement</text:span></text:p>
          </table:table-cell>
          <table:table-cell table:style-name="表格119.A3" table:number-columns-spanned="2" office:value-type="string">
            <text:p text:style-name="P15"><text:span text:style-name="T31">✅ 根本解決方案。SQL 骨架與資料完全分離，首選防禦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15"><text:span text:style-name="T31">輸入驗證 (Input Validation)</text:span></text:p>
          </table:table-cell>
          <table:table-cell table:style-name="表格119.A7" table:number-columns-spanned="2" office:value-type="string">
            <text:p text:style-name="P15"><text:span text:style-name="T31">過濾或拒絕特殊字元（如單引號），輔助手段，但單靠此法仍可能被繞過。</text:span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15"><text:span text:style-name="T31">WAF（網站應用防火牆）</text:span></text:p>
          </table:table-cell>
          <table:table-cell table:style-name="表格119.A3" table:number-columns-spanned="2" office:value-type="string">
            <text:p text:style-name="P15"><text:span text:style-name="T31">偵測 OR 1=1、UNION SELECT 等攻擊特徵，自動攔截可疑請求；屬外層防護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15"><text:span text:style-name="T31">最小權限原則</text:span></text:p>
          </table:table-cell>
          <table:table-cell table:style-name="表格119.A7" table:number-columns-spanned="2" office:value-type="string">
            <text:p text:style-name="P15"><text:span text:style-name="T31">資料庫帳號只給應用程式必要的權限，避免帳號被拿下後資料全失。</text:span></text:p>
          </table:table-cell>
          <table:covered-table-cell/>
        </table:table-row>
      </table:table>
      <text:h text:style-name="P3" text:outline-level="3"><text:soft-page-break/><text:span text:style-name="T34">▍</text:span><text:span text:style-name="T35"> Zero-Day Attack（零時差攻擊）</text:span></text:h>
      <text:p text:style-name="P24"><text:span text:style-name="T28">Zero-Day 指一個「尚未被開發商發現或公開」的安全漏洞，在廠商來得及發布修補程式（Patch）之前，駭客就已利用它展開攻擊。命名由來：「Day Zero」代表廠商只有 0 天的時間來應對，沒有任何緩衝期。</text:span>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able:table-row table:style-name="表格120.1">
            <table:table-cell table:style-name="表格120.A1" table:number-columns-spanned="3" office:value-type="string">
              <text:p text:style-name="P12"><text:span text:style-name="T22">😱 傳統防毒為何失效？</text:span></text:p>
            </table:table-cell>
            <table:covered-table-cell/>
            <table:covered-table-cell/>
            <table:table-cell table:style-name="表格120.A1" office:value-type="string">
              <text:p text:style-name="P12"><text:span text:style-name="T22">🏠 生活比喻</text:span>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15"><text:span text:style-name="T27">傳統防毒靠「特徵碼（Signature）」辨識病毒，像通緝名單。但 Zero-Day 是全新未知手法，根本沒有特徵碼，防毒完全認不出來。</text:span></text:p>
          </table:table-cell>
          <table:covered-table-cell/>
          <table:covered-table-cell/>
          <table:table-cell table:style-name="表格120.A2" office:value-type="string">
            <text:p text:style-name="P15"><text:span text:style-name="T27">你家大門有個秘密漏洞，你不知道、鎖廠不知道、所有人都不知道——只有小偷知道。小偷可以天天進你家，直到漏洞被發現並修補為止。</text:span></text:p>
          </table:table-cell>
        </table:table-row>
        <table:table-row table:style-name="表格120.1">
          <table:table-cell table:style-name="表格120.A1" office:value-type="string">
            <text:p text:style-name="P13"><text:span text:style-name="T25">防禦層</text:span></text:p>
          </table:table-cell>
          <table:table-cell table:style-name="表格120.A1" office:value-type="string">
            <text:p text:style-name="P13"><text:span text:style-name="T25">手段</text:span></text:p>
          </table:table-cell>
          <table:table-cell table:style-name="表格120.A1" table:number-columns-spanned="2" office:value-type="string">
            <text:p text:style-name="P13"><text:span text:style-name="T25">說明</text:span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15"><text:span text:style-name="T31">修補</text:span></text:p>
          </table:table-cell>
          <table:table-cell table:style-name="表格120.A2" office:value-type="string">
            <text:p text:style-name="P15"><text:span text:style-name="T31">Patch 更新</text:span></text:p>
          </table:table-cell>
          <table:table-cell table:style-name="表格120.A2" table:number-columns-spanned="2" office:value-type="string">
            <text:p text:style-name="P15"><text:span text:style-name="T31">漏洞公開後立即套用廠商安全更新（這是最重要的行動）</text:span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15"><text:span text:style-name="T31">偵測</text:span></text:p>
          </table:table-cell>
          <table:table-cell table:style-name="表格120.A5" office:value-type="string">
            <text:p text:style-name="P15"><text:span text:style-name="T31">IDS / IPS</text:span></text:p>
          </table:table-cell>
          <table:table-cell table:style-name="表格120.A5" table:number-columns-spanned="2" office:value-type="string">
            <text:p text:style-name="P15"><text:span text:style-name="T31">IDS 發現異常後發警報；IPS 直接攔截惡意流量</text:span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15"><text:span text:style-name="T31">深度檢查</text:span></text:p>
          </table:table-cell>
          <table:table-cell table:style-name="表格120.A2" office:value-type="string">
            <text:p text:style-name="P15"><text:span text:style-name="T31">DPI（深度封包檢查）</text:span></text:p>
          </table:table-cell>
          <table:table-cell table:style-name="表格120.A2" table:number-columns-spanned="2" office:value-type="string">
            <text:p text:style-name="P15"><text:span text:style-name="T31">拆開檢查封包內容，偵測隱藏其中的攻擊指令</text:span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15"><text:span text:style-name="T31">隔離</text:span></text:p>
          </table:table-cell>
          <table:table-cell table:style-name="表格120.A5" office:value-type="string">
            <text:p text:style-name="P15"><text:span text:style-name="T31">網路分段</text:span></text:p>
          </table:table-cell>
          <table:table-cell table:style-name="表格120.A5" table:number-columns-spanned="2" office:value-type="string">
            <text:p text:style-name="P15"><text:span text:style-name="T31">把網路切成多區，即使入侵一區也難橫向擴散</text:span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15"><text:span text:style-name="T31">降低風險</text:span></text:p>
          </table:table-cell>
          <table:table-cell table:style-name="表格120.A2" office:value-type="string">
            <text:p text:style-name="P15"><text:span text:style-name="T31">最小權限原則</text:span></text:p>
          </table:table-cell>
          <table:table-cell table:style-name="表格120.A2" table:number-columns-spanned="2" office:value-type="string">
            <text:p text:style-name="P15"><text:span text:style-name="T31">每個帳號只給必要的最低權限，減少淪陷後的損害</text:span></text:p>
          </table:table-cell>
          <table:covered-table-cell/>
        </table:table-row>
      </table:table>
      <text:h text:style-name="P3" text:outline-level="3"><text:span text:style-name="T34">▍</text:span><text:span text:style-name="T35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13"><text:span text:style-name="T25">機制</text:span></text:p>
            </table:table-cell>
            <table:table-cell table:style-name="表格121.A1" office:value-type="string">
              <text:p text:style-name="P13"><text:span text:style-name="T25">白話比喻</text:span></text:p>
            </table:table-cell>
            <table:table-cell table:style-name="表格121.A1" office:value-type="string">
              <text:p text:style-name="P13"><text:span text:style-name="T25">主要功能</text:span></text:p>
            </table:table-cell>
            <table:table-cell table:style-name="表格121.A1" office:value-type="string">
              <text:p text:style-name="P13"><text:span text:style-name="T25">備註</text:span>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15"><text:span text:style-name="T31">Firewall</text:span></text:p>
          </table:table-cell>
          <table:table-cell table:style-name="表格121.A2" office:value-type="string">
            <text:p text:style-name="P15"><text:span text:style-name="T31">社區大門保全</text:span></text:p>
          </table:table-cell>
          <table:table-cell table:style-name="表格121.A2" office:value-type="string">
            <text:p text:style-name="P15"><text:span text:style-name="T31">依 IP、Port、協定決定允許或拒絕流量</text:span></text:p>
          </table:table-cell>
          <table:table-cell table:style-name="表格121.A2" office:value-type="string">
            <text:p text:style-name="P15"><text:span text:style-name="T31">基礎但必要</text:span></text:p>
          </table:table-cell>
        </table:table-row>
        <table:table-row table:style-name="表格121.1">
          <table:table-cell table:style-name="表格121.A3" office:value-type="string">
            <text:p text:style-name="P15"><text:span text:style-name="T31">IDS</text:span></text:p>
          </table:table-cell>
          <table:table-cell table:style-name="表格121.A3" office:value-type="string">
            <text:p text:style-name="P15"><text:span text:style-name="T31">監視器</text:span></text:p>
          </table:table-cell>
          <table:table-cell table:style-name="表格121.A3" office:value-type="string">
            <text:p text:style-name="P15"><text:span text:style-name="T31">偵測到異常流量後產生警報，不主動攔截</text:span></text:p>
          </table:table-cell>
          <table:table-cell table:style-name="表格121.A3" office:value-type="string">
            <text:p text:style-name="P15"><text:span text:style-name="T31">只警告</text:span></text:p>
          </table:table-cell>
        </table:table-row>
        <table:table-row table:style-name="表格121.1">
          <table:table-cell table:style-name="表格121.A2" office:value-type="string">
            <text:p text:style-name="P15"><text:span text:style-name="T31">IPS</text:span></text:p>
          </table:table-cell>
          <table:table-cell table:style-name="表格121.A2" office:value-type="string">
            <text:p text:style-name="P15"><text:span text:style-name="T31">警衛直接攔人</text:span></text:p>
          </table:table-cell>
          <table:table-cell table:style-name="表格121.A2" office:value-type="string">
            <text:p text:style-name="P15"><text:span text:style-name="T31">自動阻斷偵測到的攻擊流量</text:span></text:p>
          </table:table-cell>
          <table:table-cell table:style-name="表格121.A2" office:value-type="string">
            <text:p text:style-name="P15"><text:span text:style-name="T31">直接阻擋</text:span></text:p>
          </table:table-cell>
        </table:table-row>
        <table:table-row table:style-name="表格121.1">
          <table:table-cell table:style-name="表格121.A3" office:value-type="string">
            <text:p text:style-name="P15"><text:span text:style-name="T31">DPI</text:span></text:p>
          </table:table-cell>
          <table:table-cell table:style-name="表格121.A3" office:value-type="string">
            <text:p text:style-name="P15"><text:span text:style-name="T31">海關拆包裹</text:span></text:p>
          </table:table-cell>
          <table:table-cell table:style-name="表格121.A3" office:value-type="string">
            <text:p text:style-name="P15"><text:span text:style-name="T31">不只看封包表頭，深入檢查封包內容</text:span></text:p>
          </table:table-cell>
          <table:table-cell table:style-name="表格121.A3" office:value-type="string">
            <text:p text:style-name="P15"><text:span text:style-name="T31">最深層檢查</text:span></text:p>
          </table:table-cell>
        </table:table-row>
        <table:table-row table:style-name="表格121.1">
          <table:table-cell table:style-name="表格121.A2" office:value-type="string">
            <text:p text:style-name="P15"><text:span text:style-name="T31">WAF</text:span></text:p>
          </table:table-cell>
          <table:table-cell table:style-name="表格121.A2" office:value-type="string">
            <text:p text:style-name="P15"><text:span text:style-name="T31">網站門口掃描機</text:span></text:p>
          </table:table-cell>
          <table:table-cell table:style-name="表格121.A2" office:value-type="string">
            <text:p text:style-name="P15"><text:span text:style-name="T31">專門針對 Web 攻擊（SQLi、XSS）過濾</text:span></text:p>
          </table:table-cell>
          <table:table-cell table:style-name="表格121.A2" office:value-type="string">
            <text:p text:style-name="P15"><text:span text:style-name="T31">網站專用</text:span>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8"><text:span text:style-name="T33">⚠️ <text:s/></text:span><text:span text:style-name="T39">考試常考</text:span></text:p>
            <text:p text:style-name="P19"><text:span text:style-name="T28">IDS 只發警報（不攔截）；IPS 主動阻擋（有副作用風險，可能誤擋正常流量）。這兩個差異是必考重點。</text:span>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34">▍</text:span><text:span text:style-name="T35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12"><text:span text:style-name="T25">Step</text:span></text:p>
            </table:table-cell>
            <table:table-cell table:style-name="表格122.A1" office:value-type="string">
              <text:p text:style-name="P12"><text:span text:style-name="T25">階段</text:span></text:p>
            </table:table-cell>
            <table:table-cell table:style-name="表格122.A1" office:value-type="string">
              <text:p text:style-name="P12"><text:span text:style-name="T25">做什麼</text:span>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15"><text:span text:style-name="T31">1</text:span></text:p>
          </table:table-cell>
          <table:table-cell table:style-name="表格122.A2" office:value-type="string">
            <text:p text:style-name="P15"><text:span text:style-name="T31">偵察 Reconnaissance</text:span></text:p>
          </table:table-cell>
          <table:table-cell table:style-name="表格122.A2" office:value-type="string">
            <text:p text:style-name="P15"><text:span text:style-name="T31">掃描目標網站，找漏洞：SQL Injection、弱密碼、過時元件</text:span></text:p>
          </table:table-cell>
        </table:table-row>
        <table:table-row table:style-name="表格122.1">
          <table:table-cell table:style-name="表格122.A3" office:value-type="string">
            <text:p text:style-name="P15"><text:span text:style-name="T31">2</text:span></text:p>
          </table:table-cell>
          <table:table-cell table:style-name="表格122.A3" office:value-type="string">
            <text:p text:style-name="P15"><text:span text:style-name="T31">試探 Probing</text:span></text:p>
          </table:table-cell>
          <table:table-cell table:style-name="表格122.A3" office:value-type="string">
            <text:p text:style-name="P15"><text:span text:style-name="T31">嘗試輸入 ' OR 1=1 -- 等攻擊字串，觀察系統回應</text:span></text:p>
          </table:table-cell>
        </table:table-row>
        <table:table-row table:style-name="表格122.1">
          <table:table-cell table:style-name="表格122.A2" office:value-type="string">
            <text:p text:style-name="P15"><text:span text:style-name="T31">3</text:span></text:p>
          </table:table-cell>
          <table:table-cell table:style-name="表格122.A2" office:value-type="string">
            <text:p text:style-name="P15"><text:span text:style-name="T31">取得初步權限</text:span></text:p>
          </table:table-cell>
          <table:table-cell table:style-name="表格122.A2" office:value-type="string">
            <text:p text:style-name="P15"><text:span text:style-name="T31">成功繞過驗證或取得資料庫讀取權，可能拿到帳密清單</text:span></text:p>
          </table:table-cell>
        </table:table-row>
        <table:table-row table:style-name="表格122.1">
          <table:table-cell table:style-name="表格122.A3" office:value-type="string">
            <text:p text:style-name="P15"><text:span text:style-name="T31">4</text:span></text:p>
          </table:table-cell>
          <table:table-cell table:style-name="表格122.A3" office:value-type="string">
            <text:p text:style-name="P15"><text:span text:style-name="T31">橫向移動 Lateral Movement</text:span></text:p>
          </table:table-cell>
          <table:table-cell table:style-name="表格122.A3" office:value-type="string">
            <text:p text:style-name="P15"><text:span text:style-name="T31">從網站主機延伸進資料庫，再滲透內網其他系統</text:span></text:p>
          </table:table-cell>
        </table:table-row>
        <table:table-row table:style-name="表格122.1">
          <table:table-cell table:style-name="表格122.A2" office:value-type="string">
            <text:p text:style-name="P15"><text:span text:style-name="T31">5</text:span></text:p>
          </table:table-cell>
          <table:table-cell table:style-name="表格122.A2" office:value-type="string">
            <text:p text:style-name="P15"><text:span text:style-name="T31">竊取資料 Exfiltration</text:span></text:p>
          </table:table-cell>
          <table:table-cell table:style-name="表格122.A2" office:value-type="string">
            <text:p text:style-name="P15"><text:span text:style-name="T31">偷取個資、信用卡資料、機密文件</text:span></text:p>
          </table:table-cell>
        </table:table-row>
        <table:table-row table:style-name="表格122.1">
          <table:table-cell table:style-name="表格122.A3" office:value-type="string">
            <text:p text:style-name="P15"><text:span text:style-name="T31">6</text:span></text:p>
          </table:table-cell>
          <table:table-cell table:style-name="表格122.A3" office:value-type="string">
            <text:p text:style-name="P15"><text:span text:style-name="T31">植入後門 Backdoor</text:span></text:p>
          </table:table-cell>
          <table:table-cell table:style-name="表格122.A3" office:value-type="string">
            <text:p text:style-name="P15"><text:span text:style-name="T31">埋下後門程式，確保下次還能輕鬆進入</text:span></text:p>
          </table:table-cell>
        </table:table-row>
        <table:table-row table:style-name="表格122.1">
          <table:table-cell table:style-name="表格122.A2" office:value-type="string">
            <text:p text:style-name="P15"><text:span text:style-name="T31">7</text:span></text:p>
          </table:table-cell>
          <table:table-cell table:style-name="表格122.A2" office:value-type="string">
            <text:p text:style-name="P15"><text:span text:style-name="T31">勒索或變現</text:span></text:p>
          </table:table-cell>
          <table:table-cell table:style-name="表格122.A2" office:value-type="string">
            <text:p text:style-name="P15"><text:span text:style-name="T31">加密資料索取贖金，或在暗網販售竊取的資料</text:span>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8"><text:span text:style-name="T33">⚠️ <text:s/></text:span><text:span text:style-name="T39">公職考試常見陷阱</text:span></text:p>
            <text:p text:style-name="P19"><text:span text:style-name="T29">「輸入驗證」就足夠防 SQLi？　</text:span><text:span text:style-name="T28">❌ 不夠，過濾特殊字元有被繞過風險。✅ 真正防禦是 Prepared Statement。</text:span></text:p>
            <text:p text:style-name="P20"><text:span text:style-name="T29">WAF 可以完全防止所有攻擊？　</text:span><text:span text:style-name="T28">❌ 不能，WAF 是輔助防禦，新型攻擊可能繞過。✅ WAF + Prepared </text:span><text:soft-page-break/><text:span text:style-name="T28">Statement 才是正道。</text:span></text:p>
            <text:p text:style-name="P20"><text:span text:style-name="T29">Zero-Day 最危險是它「很強大」？　</text:span><text:span text:style-name="T28">❌ 不是，最危險的是「還沒人知道」，防毒無法識別。</text:span></text:p>
            <text:p text:style-name="P20"><text:span text:style-name="T29">IDS 可以阻擋攻擊？　</text:span><text:span text:style-name="T28">❌ 不行，IDS 只能偵測警報，能阻擋的是 IPS。</text:span></text:p>
          </table:table-cell>
          <table:covered-table-cell/>
          <table:covered-table-cell/>
        </table:table-row>
      </table:table>
      <text:h text:style-name="P2" text:outline-level="2"><text:span text:style-name="T4">參、網路安全：Firewall · IDS · IPS · SNMP · ICMP</text:span>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13"><text:span text:style-name="T22">工具</text:span></text:p>
            </table:table-cell>
            <table:table-cell table:style-name="表格123.A1" office:value-type="string">
              <text:p text:style-name="P13"><text:span text:style-name="T22">角色</text:span></text:p>
            </table:table-cell>
            <table:table-cell table:style-name="表格123.A1" office:value-type="string">
              <text:p text:style-name="P13"><text:span text:style-name="T22">功能</text:span>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15"><text:span text:style-name="T27">🚪 Firewall</text:span></text:p>
          </table:table-cell>
          <table:table-cell table:style-name="表格123.A2" office:value-type="string">
            <text:p text:style-name="P15"><text:span text:style-name="T27">大門警衛</text:span></text:p>
          </table:table-cell>
          <table:table-cell table:style-name="表格123.A2" office:value-type="string">
            <text:p text:style-name="P15"><text:span text:style-name="T27">過濾進出流量（擋或放）</text:span></text:p>
          </table:table-cell>
        </table:table-row>
        <table:table-row table:style-name="表格123.1">
          <table:table-cell table:style-name="表格123.A3" office:value-type="string">
            <text:p text:style-name="P15"><text:span text:style-name="T27">👀 IDS</text:span></text:p>
          </table:table-cell>
          <table:table-cell table:style-name="表格123.A3" office:value-type="string">
            <text:p text:style-name="P15"><text:span text:style-name="T27">監視器（只看）</text:span></text:p>
          </table:table-cell>
          <table:table-cell table:style-name="表格123.A3" office:value-type="string">
            <text:p text:style-name="P15"><text:span text:style-name="T27">偵測異常、發出警報，不主動阻擋</text:span></text:p>
          </table:table-cell>
        </table:table-row>
        <table:table-row table:style-name="表格123.1">
          <table:table-cell table:style-name="表格123.A2" office:value-type="string">
            <text:p text:style-name="P15"><text:span text:style-name="T27">🚨 IPS</text:span></text:p>
          </table:table-cell>
          <table:table-cell table:style-name="表格123.A2" office:value-type="string">
            <text:p text:style-name="P15"><text:span text:style-name="T27">監視器＋警衛</text:span></text:p>
          </table:table-cell>
          <table:table-cell table:style-name="表格123.A2" office:value-type="string">
            <text:p text:style-name="P15"><text:span text:style-name="T27">偵測異常並自動阻擋攻擊</text:span></text:p>
          </table:table-cell>
        </table:table-row>
        <table:table-row table:style-name="表格123.1">
          <table:table-cell table:style-name="表格123.A3" office:value-type="string">
            <text:p text:style-name="P15"><text:span text:style-name="T27">📊 SNMP</text:span></text:p>
          </table:table-cell>
          <table:table-cell table:style-name="表格123.A3" office:value-type="string">
            <text:p text:style-name="P15"><text:span text:style-name="T27">管理室</text:span></text:p>
          </table:table-cell>
          <table:table-cell table:style-name="表格123.A3" office:value-type="string">
            <text:p text:style-name="P15"><text:span text:style-name="T27">監控網路設備狀態（CPU、流量等）</text:span></text:p>
          </table:table-cell>
        </table:table-row>
        <table:table-row table:style-name="表格123.1">
          <table:table-cell table:style-name="表格123.A2" office:value-type="string">
            <text:p text:style-name="P15"><text:span text:style-name="T27">📶 ICMP</text:span></text:p>
          </table:table-cell>
          <table:table-cell table:style-name="表格123.A2" office:value-type="string">
            <text:p text:style-name="P15"><text:span text:style-name="T27">網路測試員</text:span></text:p>
          </table:table-cell>
          <table:table-cell table:style-name="表格123.A2" office:value-type="string">
            <text:p text:style-name="P15"><text:span text:style-name="T27">診斷網路連線（Ping / Traceroute）</text:span>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8"><text:span text:style-name="T33">⚡ <text:s/></text:span><text:span text:style-name="T35">核心記憶口訣</text:span></text:p>
            <text:p text:style-name="P19"><text:span text:style-name="T28">Firewall 擋入口 · IDS 只看 · IPS 看＋擋。</text:span></text:p>
          </table:table-cell>
          <table:covered-table-cell/>
          <table:covered-table-cell/>
        </table:table-row>
      </table:table>
      <text:h text:style-name="P3" text:outline-level="3"><text:span text:style-name="T34">▍</text:span><text:span text:style-name="T35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13"/>
            </table:table-cell>
            <table:table-cell table:style-name="表格124.A1" office:value-type="string">
              <text:p text:style-name="P13"><text:span text:style-name="T22">HIDS</text:span></text:p>
            </table:table-cell>
            <table:table-cell table:style-name="表格124.A1" office:value-type="string">
              <text:p text:style-name="P13"><text:span text:style-name="T22">NIDS</text:span>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15"><text:span text:style-name="T27">安裝位置</text:span></text:p>
          </table:table-cell>
          <table:table-cell table:style-name="表格124.A2" office:value-type="string">
            <text:p text:style-name="P15"><text:span text:style-name="T27">裝在主機（電腦）內部</text:span></text:p>
          </table:table-cell>
          <table:table-cell table:style-name="表格124.A2" office:value-type="string">
            <text:p text:style-name="P15"><text:span text:style-name="T27">裝在網路節點（交換器旁）</text:span></text:p>
          </table:table-cell>
        </table:table-row>
        <table:table-row table:style-name="表格124.1">
          <table:table-cell table:style-name="表格124.A3" office:value-type="string">
            <text:p text:style-name="P15"><text:span text:style-name="T27">監控內容</text:span></text:p>
          </table:table-cell>
          <table:table-cell table:style-name="表格124.A3" office:value-type="string">
            <text:p text:style-name="P15"><text:span text:style-name="T27">系統 Log、使用者行為</text:span></text:p>
          </table:table-cell>
          <table:table-cell table:style-name="表格124.A3" office:value-type="string">
            <text:p text:style-name="P15"><text:span text:style-name="T27">網路封包與流量</text:span></text:p>
          </table:table-cell>
        </table:table-row>
        <table:table-row table:style-name="表格124.1">
          <table:table-cell table:style-name="表格124.A2" office:value-type="string">
            <text:p text:style-name="P15"><text:span text:style-name="T27">比喻</text:span></text:p>
          </table:table-cell>
          <table:table-cell table:style-name="表格124.A2" office:value-type="string">
            <text:p text:style-name="P15"><text:span text:style-name="T27">電腦裡的監視器</text:span></text:p>
          </table:table-cell>
          <table:table-cell table:style-name="表格124.A2" office:value-type="string">
            <text:p text:style-name="P15"><text:span text:style-name="T27">路口的交通監視器</text:span>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8"><text:span text:style-name="T33">⚡ <text:s/></text:span><text:span text:style-name="T35">一句話秒懂</text:span></text:p>
            <text:p text:style-name="P19"><text:span text:style-name="T28">HIDS 看主機（Log）· NIDS 看網路（封包）。</text:span></text:p>
          </table:table-cell>
          <table:covered-table-cell/>
          <table:covered-table-cell/>
        </table:table-row>
      </table:table>
      <text:h text:style-name="P3" text:outline-level="3"><text:span text:style-name="T34">▍</text:span><text:span text:style-name="T35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13"/>
            </table:table-cell>
            <table:table-cell table:style-name="表格125.A1" office:value-type="string">
              <text:p text:style-name="P13"><text:span text:style-name="T22">SNMP</text:span></text:p>
            </table:table-cell>
            <table:table-cell table:style-name="表格125.A1" office:value-type="string">
              <text:p text:style-name="P13"><text:span text:style-name="T22">ICMP</text:span>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15"><text:span text:style-name="T27">用途</text:span></text:p>
          </table:table-cell>
          <table:table-cell table:style-name="表格125.A2" office:value-type="string">
            <text:p text:style-name="P15"><text:span text:style-name="T27">管理與監控網路設備</text:span></text:p>
          </table:table-cell>
          <table:table-cell table:style-name="表格125.A2" office:value-type="string">
            <text:p text:style-name="P15"><text:span text:style-name="T27">測試網路是否連通</text:span></text:p>
          </table:table-cell>
        </table:table-row>
        <table:table-row table:style-name="表格125.1">
          <table:table-cell table:style-name="表格125.A3" office:value-type="string">
            <text:p text:style-name="P15"><text:span text:style-name="T27">OSI 層</text:span></text:p>
          </table:table-cell>
          <table:table-cell table:style-name="表格125.A3" office:value-type="string">
            <text:p text:style-name="P15"><text:span text:style-name="T27">Application Layer（應用層）</text:span></text:p>
          </table:table-cell>
          <table:table-cell table:style-name="表格125.A3" office:value-type="string">
            <text:p text:style-name="P15"><text:span text:style-name="T27">Network Layer（網路層）</text:span></text:p>
          </table:table-cell>
        </table:table-row>
        <table:table-row table:style-name="表格125.1">
          <table:table-cell table:style-name="表格125.A2" office:value-type="string">
            <text:p text:style-name="P15"><text:span text:style-name="T27">傳輸協定</text:span></text:p>
          </table:table-cell>
          <table:table-cell table:style-name="表格125.A2" office:value-type="string">
            <text:p text:style-name="P15"><text:span text:style-name="T27">UDP</text:span></text:p>
          </table:table-cell>
          <table:table-cell table:style-name="表格125.A2" office:value-type="string">
            <text:p text:style-name="P15"><text:span text:style-name="T27">IP 的附屬協定</text:span></text:p>
          </table:table-cell>
        </table:table-row>
        <table:table-row table:style-name="表格125.1">
          <table:table-cell table:style-name="表格125.A3" office:value-type="string">
            <text:p text:style-name="P15"><text:span text:style-name="T27">常見功能</text:span></text:p>
          </table:table-cell>
          <table:table-cell table:style-name="表格125.A3" office:value-type="string">
            <text:p text:style-name="P15"><text:span text:style-name="T27">看 CPU 使用率、設備狀態、Trap 警報</text:span></text:p>
          </table:table-cell>
          <table:table-cell table:style-name="表格125.A3" office:value-type="string">
            <text:p text:style-name="P15"><text:span text:style-name="T27">Ping、Traceroute</text:span></text:p>
          </table:table-cell>
        </table:table-row>
        <table:table-row table:style-name="表格125.1">
          <table:table-cell table:style-name="表格125.A2" office:value-type="string">
            <text:p text:style-name="P15"><text:span text:style-name="T27">比喻</text:span></text:p>
          </table:table-cell>
          <table:table-cell table:style-name="表格125.A2" office:value-type="string">
            <text:p text:style-name="P15"><text:span text:style-name="T27">大樓管理室的監控系統</text:span></text:p>
          </table:table-cell>
          <table:table-cell table:style-name="表格125.A2" office:value-type="string">
            <text:p text:style-name="P15"><text:span text:style-name="T27">網路連線的體溫計</text:span>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8"><text:span text:style-name="T33">⚡ <text:s/></text:span><text:span text:style-name="T35">核心差異</text:span></text:p>
            <text:p text:style-name="P19"><text:span text:style-name="T28">SNMP 管理設備（應用層 / UDP）· ICMP 診斷網路（網路層）。</text:span></text:p>
          </table:table-cell>
          <table:covered-table-cell/>
          <table:covered-table-cell/>
        </table:table-row>
      </table:table>
      <text:h text:style-name="P3" text:outline-level="3"><text:span text:style-name="T34">▍</text:span><text:span text:style-name="T35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8"><text:span text:style-name="T33">🗺 <text:s/></text:span><text:span text:style-name="T10">工具各自負責的位置</text:span></text:p>
            <text:p text:style-name="P19"><text:span text:style-name="T28">🌐 外部攻擊者 → 🚪 Firewall（第一道防線，依 IP/Port 規則過濾）→ 📡 NIDS / IPS（網路中間監控：IDS 分析封包發現異常只發警報；IPS 分析封包發現異常直接阻擋）→ 🖥 主機 / Server → 👀 </text:span><text:soft-page-break/><text:span text:style-name="T28">HIDS（主機內部最後防線，監控系統 Log 與使用者行為）。旁側：📊 SNMP 監控全域設備狀態；📶 ICMP（Ping/Traceroute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18"><text:span text:style-name="T33">⚠️ <text:s/></text:span><text:span text:style-name="T39">考試陷阱整理</text:span></text:p>
            <text:p text:style-name="P19"><text:span text:style-name="T43">① IDS 可以自動阻擋攻擊　→　</text:span><text:span text:style-name="T28">✓ IDS 只偵測＋發警報，IPS 才會阻擋。</text:span></text:p>
            <text:p text:style-name="P20"><text:span text:style-name="T43">② Firewall 可以偵測異常行為　→　</text:span><text:span text:style-name="T28">✓ Firewall 依規則（IP/Port）過濾，不做行為分析。</text:span></text:p>
            <text:p text:style-name="P20"><text:span text:style-name="T43">③ HIDS 用來監控網路封包　→　</text:span><text:span text:style-name="T28">✓ HIDS 監控主機 Log 與系統行為，封包是 NIDS 的工作。</text:span></text:p>
            <text:p text:style-name="P20"><text:span text:style-name="T43">④ ICMP 用來監控設備狀態　→　</text:span><text:span text:style-name="T28">✓ ICMP 只診斷網路（Ping），監控設備是 SNMP。</text:span></text:p>
            <text:p text:style-name="P20"><text:span text:style-name="T43">⑤ ICMP 屬於 Application Layer　→　</text:span><text:span text:style-name="T28">✓ ICMP 屬 Network Layer，SNMP 才是 Application Layer。</text:span></text:p>
            <text:p text:style-name="P20"><text:span text:style-name="T43">⑥ IPS 就是防火牆　→　</text:span><text:span text:style-name="T28">✓ Firewall 靜態過濾（規則），IPS 動態偵測行為後阻擋，兩者不同。</text:span></text:p>
          </table:table-cell>
        </table:table-row>
      </table:table>
      <text:h text:style-name="P3" text:outline-level="3"><text:span text:style-name="T34">▍</text:span><text:span text:style-name="T35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13"><text:span text:style-name="T26">題目</text:span></text:p>
            </table:table-cell>
            <table:table-cell table:style-name="表格127.A1" office:value-type="string">
              <text:p text:style-name="P13"><text:span text:style-name="T26">答案</text:span></text:p>
            </table:table-cell>
            <table:table-cell table:style-name="表格127.A1" office:value-type="string">
              <text:p text:style-name="P13"><text:span text:style-name="T26">解析</text:span>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15"><text:span text:style-name="T32">Q1 何者負責「過濾進出網路流量」？</text:span></text:p>
          </table:table-cell>
          <table:table-cell table:style-name="表格127.A2" office:value-type="string">
            <text:p text:style-name="P15"><text:span text:style-name="T32">Firewall</text:span></text:p>
          </table:table-cell>
          <table:table-cell table:style-name="表格127.A2" office:value-type="string">
            <text:p text:style-name="P15"><text:span text:style-name="T32">Firewall 是網路入口過濾工具，依規則決定放行。IDS/IPS 是偵測系統。</text:span></text:p>
          </table:table-cell>
        </table:table-row>
        <table:table-row table:style-name="表格127.1">
          <table:table-cell table:style-name="表格127.A3" office:value-type="string">
            <text:p text:style-name="P15"><text:span text:style-name="T32">Q2 IDS 的主要功能為何？</text:span></text:p>
          </table:table-cell>
          <table:table-cell table:style-name="表格127.A3" office:value-type="string">
            <text:p text:style-name="P15"><text:span text:style-name="T32">偵測並發出警報</text:span></text:p>
          </table:table-cell>
          <table:table-cell table:style-name="表格127.A3" office:value-type="string">
            <text:p text:style-name="P15"><text:span text:style-name="T32">IDS 只負責偵測＋警報，不會主動阻擋。</text:span></text:p>
          </table:table-cell>
        </table:table-row>
        <table:table-row table:style-name="表格127.1">
          <table:table-cell table:style-name="表格127.A2" office:value-type="string">
            <text:p text:style-name="P15"><text:span text:style-name="T32">Q3 IPS 與 IDS 最大差別？</text:span></text:p>
          </table:table-cell>
          <table:table-cell table:style-name="表格127.A2" office:value-type="string">
            <text:p text:style-name="P15"><text:span text:style-name="T32">IPS 會阻擋，IDS 不會</text:span></text:p>
          </table:table-cell>
          <table:table-cell table:style-name="表格127.A2" office:value-type="string">
            <text:p text:style-name="P15"><text:span text:style-name="T32">IPS = IDS 全功能 + 主動阻擋。</text:span></text:p>
          </table:table-cell>
        </table:table-row>
        <table:table-row table:style-name="表格127.1">
          <table:table-cell table:style-name="表格127.A3" office:value-type="string">
            <text:p text:style-name="P15"><text:span text:style-name="T32">Q4 何者屬「主機型入侵偵測」？</text:span></text:p>
          </table:table-cell>
          <table:table-cell table:style-name="表格127.A3" office:value-type="string">
            <text:p text:style-name="P15"><text:span text:style-name="T32">HIDS</text:span></text:p>
          </table:table-cell>
          <table:table-cell table:style-name="表格127.A3" office:value-type="string">
            <text:p text:style-name="P15"><text:span text:style-name="T32">HIDS 安裝於主機內部，監控 Log 與系統行為。</text:span></text:p>
          </table:table-cell>
        </table:table-row>
        <table:table-row table:style-name="表格127.1">
          <table:table-cell table:style-name="表格127.A2" office:value-type="string">
            <text:p text:style-name="P15"><text:span text:style-name="T32">Q5 NIDS 主要監控什麼？</text:span></text:p>
          </table:table-cell>
          <table:table-cell table:style-name="表格127.A2" office:value-type="string">
            <text:p text:style-name="P15"><text:span text:style-name="T32">網路封包</text:span></text:p>
          </table:table-cell>
          <table:table-cell table:style-name="表格127.A2" office:value-type="string">
            <text:p text:style-name="P15"><text:span text:style-name="T32">NIDS 部署在網路節點，分析封包流量；HIDS 才看 Log。</text:span></text:p>
          </table:table-cell>
        </table:table-row>
        <table:table-row table:style-name="表格127.1">
          <table:table-cell table:style-name="表格127.A3" office:value-type="string">
            <text:p text:style-name="P15"><text:span text:style-name="T32">Q6 SNMP 的主要用途？</text:span></text:p>
          </table:table-cell>
          <table:table-cell table:style-name="表格127.A3" office:value-type="string">
            <text:p text:style-name="P15"><text:span text:style-name="T32">管理網路設備</text:span></text:p>
          </table:table-cell>
          <table:table-cell table:style-name="表格127.A3" office:value-type="string">
            <text:p text:style-name="P15"><text:span text:style-name="T32">SNMP 監控與管理路由器、交換器狀態（CPU、流量）。</text:span></text:p>
          </table:table-cell>
        </table:table-row>
        <table:table-row table:style-name="表格127.1">
          <table:table-cell table:style-name="表格127.A2" office:value-type="string">
            <text:p text:style-name="P15"><text:span text:style-name="T32">Q7 ICMP 常用於哪種工具？</text:span></text:p>
          </table:table-cell>
          <table:table-cell table:style-name="表格127.A2" office:value-type="string">
            <text:p text:style-name="P15"><text:span text:style-name="T32">Ping</text:span></text:p>
          </table:table-cell>
          <table:table-cell table:style-name="表格127.A2" office:value-type="string">
            <text:p text:style-name="P15"><text:span text:style-name="T32">Ping 與 Traceroute 都用 ICMP 診斷網路連線。</text:span></text:p>
          </table:table-cell>
        </table:table-row>
        <table:table-row table:style-name="表格127.1">
          <table:table-cell table:style-name="表格127.A3" office:value-type="string">
            <text:p text:style-name="P15"><text:span text:style-name="T32">Q8 ICMP 屬 OSI 哪一層？</text:span></text:p>
          </table:table-cell>
          <table:table-cell table:style-name="表格127.A3" office:value-type="string">
            <text:p text:style-name="P15"><text:span text:style-name="T32">Network Layer</text:span></text:p>
          </table:table-cell>
          <table:table-cell table:style-name="表格127.A3" office:value-type="string">
            <text:p text:style-name="P15"><text:span text:style-name="T32">ICMP 是 IP 的附屬協定，屬網路層；SNMP 才是應用層。</text:span></text:p>
          </table:table-cell>
        </table:table-row>
        <table:table-row table:style-name="表格127.1">
          <table:table-cell table:style-name="表格127.A2" office:value-type="string">
            <text:p text:style-name="P15"><text:span text:style-name="T32">Q9 何者用 UDP 且屬應用層？</text:span></text:p>
          </table:table-cell>
          <table:table-cell table:style-name="表格127.A2" office:value-type="string">
            <text:p text:style-name="P15"><text:span text:style-name="T32">SNMP</text:span></text:p>
          </table:table-cell>
          <table:table-cell table:style-name="表格127.A2" office:value-type="string">
            <text:p text:style-name="P15"><text:span text:style-name="T32">SNMP 用 UDP、屬應用層；ICMP 是網路層。</text:span></text:p>
          </table:table-cell>
        </table:table-row>
        <table:table-row table:style-name="表格127.1">
          <table:table-cell table:style-name="表格127.A3" office:value-type="string">
            <text:p text:style-name="P15"><text:span text:style-name="T32">Q10 下列何者正確？</text:span></text:p>
          </table:table-cell>
          <table:table-cell table:style-name="表格127.A3" office:value-type="string">
            <text:p text:style-name="P15"><text:span text:style-name="T32">SNMP 用於設備管理</text:span></text:p>
          </table:table-cell>
          <table:table-cell table:style-name="表格127.A3" office:value-type="string">
            <text:p text:style-name="P15"><text:span text:style-name="T32">IDS 不阻擋；Firewall 不做行為分析；ICMP 只做網路診斷。</text:span></text:p>
          </table:table-cell>
        </table:table-row>
      </table:table>
      <text:h text:style-name="P2" text:outline-level="2"><text:span text:style-name="T4">肆、企業資訊安全：預防 → 偵測 → 復原</text:span></text:h>
      <text:p text:style-name="P24"><text:span text:style-name="T28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span>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13"><text:span text:style-name="T25">三大核心</text:span></text:p>
            </table:table-cell>
            <table:table-cell table:style-name="表格128.A1" office:value-type="string">
              <text:p text:style-name="P13"><text:span text:style-name="T25">目標</text:span></text:p>
            </table:table-cell>
            <table:table-cell table:style-name="表格128.A1" office:value-type="string">
              <text:p text:style-name="P13"><text:span text:style-name="T25">做法</text:span>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15"><text:span text:style-name="T31">① 事前預防</text:span></text:p>
          </table:table-cell>
          <table:table-cell table:style-name="表格128.A2" office:value-type="string">
            <text:p text:style-name="P15"><text:span text:style-name="T31">讓壞事不要發生</text:span></text:p>
          </table:table-cell>
          <table:table-cell table:style-name="表格128.A2" office:value-type="string">
            <text:p text:style-name="P15"><text:span text:style-name="T31">設密碼、MFA、防火牆、教育訓練、弱點掃描、資產盤點</text:span></text:p>
          </table:table-cell>
        </table:table-row>
        <table:table-row table:style-name="表格128.1">
          <table:table-cell table:style-name="表格128.A3" office:value-type="string">
            <text:p text:style-name="P15"><text:span text:style-name="T31">② 事中偵測</text:span></text:p>
          </table:table-cell>
          <table:table-cell table:style-name="表格128.A3" office:value-type="string">
            <text:p text:style-name="P15"><text:span text:style-name="T31">出事時盡快發現</text:span></text:p>
          </table:table-cell>
          <table:table-cell table:style-name="表格128.A3" office:value-type="string">
            <text:p text:style-name="P15"><text:span text:style-name="T31">偵測異常登入、流量、病毒警報（IDS/IPS/NGFW/EDR/MDR）</text:span></text:p>
          </table:table-cell>
        </table:table-row>
        <table:table-row table:style-name="表格128.1">
          <table:table-cell table:style-name="表格128.A2" office:value-type="string">
            <text:p text:style-name="P15"><text:span text:style-name="T31">③ 事後復原</text:span></text:p>
          </table:table-cell>
          <table:table-cell table:style-name="表格128.A2" office:value-type="string">
            <text:p text:style-name="P15"><text:span text:style-name="T31">壞掉後快速救回來</text:span></text:p>
          </table:table-cell>
          <table:table-cell table:style-name="表格128.A2" office:value-type="string">
            <text:p text:style-name="P15"><text:span text:style-name="T31">備份還原、啟動備援系統、災難復原（BCP、RTO/RPO）</text:span></text:p>
          </table:table-cell>
        </table:table-row>
      </table:table>
      <text:h text:style-name="P3" text:outline-level="3"><text:span text:style-name="T34">▍</text:span><text:span text:style-name="T35"> 事前預防：MFA（多因素驗證）</text:span></text:h>
      <text:p text:style-name="P24"><text:span text:style-name="T28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span></text:p>
      <text:h text:style-name="P3" text:outline-level="3"><text:soft-page-break/><text:span text:style-name="T34">▍</text:span><text:span text:style-name="T35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13"><text:span text:style-name="T25">工具</text:span></text:p>
            </table:table-cell>
            <table:table-cell table:style-name="表格129.A1" office:value-type="string">
              <text:p text:style-name="P13"><text:span text:style-name="T25">全名 / 說明</text:span></text:p>
            </table:table-cell>
            <table:table-cell table:style-name="表格129.A1" office:value-type="string">
              <text:p text:style-name="P13"><text:span text:style-name="T25">會阻擋？</text:span>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15"><text:span text:style-name="T31">Firewall</text:span></text:p>
          </table:table-cell>
          <table:table-cell table:style-name="表格129.A2" office:value-type="string">
            <text:p text:style-name="P15"><text:span text:style-name="T31">控制誰能進出網路</text:span></text:p>
          </table:table-cell>
          <table:table-cell table:style-name="表格129.A2" office:value-type="string">
            <text:p text:style-name="P15"><text:span text:style-name="T31">✔ 會</text:span></text:p>
          </table:table-cell>
        </table:table-row>
        <table:table-row table:style-name="表格129.1">
          <table:table-cell table:style-name="表格129.A3" office:value-type="string">
            <text:p text:style-name="P15"><text:span text:style-name="T31">NGFW</text:span></text:p>
          </table:table-cell>
          <table:table-cell table:style-name="表格129.A3" office:value-type="string">
            <text:p text:style-name="P15"><text:span text:style-name="T31">次世代防火牆，能辨識應用層威脅</text:span></text:p>
          </table:table-cell>
          <table:table-cell table:style-name="表格129.A3" office:value-type="string">
            <text:p text:style-name="P15"><text:span text:style-name="T31">✔ 會</text:span></text:p>
          </table:table-cell>
        </table:table-row>
        <table:table-row table:style-name="表格129.1">
          <table:table-cell table:style-name="表格129.A2" office:value-type="string">
            <text:p text:style-name="P15"><text:span text:style-name="T31">IDS</text:span></text:p>
          </table:table-cell>
          <table:table-cell table:style-name="表格129.A2" office:value-type="string">
            <text:p text:style-name="P15"><text:span text:style-name="T31">入侵偵測系統，發現異常就發警報</text:span></text:p>
          </table:table-cell>
          <table:table-cell table:style-name="表格129.A2" office:value-type="string">
            <text:p text:style-name="P15"><text:span text:style-name="T31">✘ 不會</text:span></text:p>
          </table:table-cell>
        </table:table-row>
        <table:table-row table:style-name="表格129.1">
          <table:table-cell table:style-name="表格129.A3" office:value-type="string">
            <text:p text:style-name="P15"><text:span text:style-name="T31">IPS</text:span></text:p>
          </table:table-cell>
          <table:table-cell table:style-name="表格129.A3" office:value-type="string">
            <text:p text:style-name="P15"><text:span text:style-name="T31">入侵防禦系統，發現異常直接阻擋</text:span></text:p>
          </table:table-cell>
          <table:table-cell table:style-name="表格129.A3" office:value-type="string">
            <text:p text:style-name="P15"><text:span text:style-name="T31">✔ 會</text:span></text:p>
          </table:table-cell>
        </table:table-row>
        <table:table-row table:style-name="表格129.1">
          <table:table-cell table:style-name="表格129.A2" office:value-type="string">
            <text:p text:style-name="P15"><text:span text:style-name="T31">EDR</text:span></text:p>
          </table:table-cell>
          <table:table-cell table:style-name="表格129.A2" office:value-type="string">
            <text:p text:style-name="P15"><text:span text:style-name="T31">Endpoint Detection &amp; Response，監控每台電腦行為</text:span></text:p>
          </table:table-cell>
          <table:table-cell table:style-name="表格129.A2" office:value-type="string">
            <text:p text:style-name="P15"><text:span text:style-name="T31">✔ 會</text:span></text:p>
          </table:table-cell>
        </table:table-row>
        <table:table-row table:style-name="表格129.1">
          <table:table-cell table:style-name="表格129.A3" office:value-type="string">
            <text:p text:style-name="P15"><text:span text:style-name="T31">MDR</text:span></text:p>
          </table:table-cell>
          <table:table-cell table:style-name="表格129.A3" office:value-type="string">
            <text:p text:style-name="P15"><text:span text:style-name="T31">Managed D&amp;R，委外資安監控服務（24 小時）</text:span></text:p>
          </table:table-cell>
          <table:table-cell table:style-name="表格129.A3" office:value-type="string">
            <text:p text:style-name="P15"><text:span text:style-name="T31">✔ 會</text:span>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8"><text:span text:style-name="T33">🏠 <text:s/></text:span><text:span text:style-name="T10">比喻幫你秒懂（公司＝大樓）</text:span></text:p>
            <text:p text:style-name="P19"><text:span text:style-name="T28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span></text:p>
          </table:table-cell>
          <table:covered-table-cell/>
          <table:covered-table-cell/>
        </table:table-row>
      </table:table>
      <text:h text:style-name="P3" text:outline-level="3"><text:span text:style-name="T34">▍</text:span><text:span text:style-name="T35"> 事後復原：備份、RTO / RPO、BCP</text:span></text:h>
      <text:p text:style-name="P24"><text:span text:style-name="T28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span>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13"><text:span text:style-name="T25">指標</text:span></text:p>
            </table:table-cell>
            <table:table-cell table:style-name="表格130.A1" office:value-type="string">
              <text:p text:style-name="P13"><text:span text:style-name="T25">全名</text:span></text:p>
            </table:table-cell>
            <table:table-cell table:style-name="表格130.A1" office:value-type="string">
              <text:p text:style-name="P13"><text:span text:style-name="T25">問什麼</text:span></text:p>
            </table:table-cell>
            <table:table-cell table:style-name="表格130.A1" office:value-type="string">
              <text:p text:style-name="P13"><text:span text:style-name="T25">範例</text:span>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15"><text:span text:style-name="T31">RTO</text:span></text:p>
          </table:table-cell>
          <table:table-cell table:style-name="表格130.A2" office:value-type="string">
            <text:p text:style-name="P15"><text:span text:style-name="T31">Recovery Time Objective 復原時間目標</text:span></text:p>
          </table:table-cell>
          <table:table-cell table:style-name="表格130.A2" office:value-type="string">
            <text:p text:style-name="P15"><text:span text:style-name="T31">系統出問題後，最多能停多久？</text:span></text:p>
          </table:table-cell>
          <table:table-cell table:style-name="表格130.A2" office:value-type="string">
            <text:p text:style-name="P15"><text:span text:style-name="T31">銀行 RTO 10 分鐘；學校網站 RTO 半天</text:span></text:p>
          </table:table-cell>
        </table:table-row>
        <table:table-row table:style-name="表格130.1">
          <table:table-cell table:style-name="表格130.A3" office:value-type="string">
            <text:p text:style-name="P15"><text:span text:style-name="T31">RPO</text:span></text:p>
          </table:table-cell>
          <table:table-cell table:style-name="表格130.A3" office:value-type="string">
            <text:p text:style-name="P15"><text:span text:style-name="T31">Recovery Point Objective 復原點目標</text:span></text:p>
          </table:table-cell>
          <table:table-cell table:style-name="表格130.A3" office:value-type="string">
            <text:p text:style-name="P15"><text:span text:style-name="T31">最多能接受丟失幾小時的資料？</text:span></text:p>
          </table:table-cell>
          <table:table-cell table:style-name="表格130.A3" office:value-type="string">
            <text:p text:style-name="P15"><text:span text:style-name="T31">銀行 RPO 接近 0；一般公司 RPO 24 小時</text:span>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8"><text:span text:style-name="T33">⏱ <text:s/></text:span><text:span text:style-name="T49">一句話記憶法</text:span></text:p>
            <text:p text:style-name="P19"><text:span text:style-name="T50">RTO = 停機時間</text:span><text:span text:style-name="T28">（能停多久？）　</text:span><text:span text:style-name="T50">RPO = 資料損失量</text:span><text:span text:style-name="T28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8"><text:span text:style-name="T33">🏢 <text:s/></text:span><text:span text:style-name="T10">BCP：公司炸掉了還能繼續運作嗎？</text:span></text:p>
            <text:p text:style-name="P19"><text:span text:style-name="T28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span>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34">▍</text:span><text:span text:style-name="T35"> SSDLC：軟體開發的每個階段都加入資安</text:span></text:h>
      <text:p text:style-name="P24"><text:span text:style-name="T28">SSDLC = Security Software Development Life Cycle。以前工程師只顧「功能能動就好」，上線後才補漏洞；正確做法是每個開發階段都同時考慮「這樣做會不會被駭？」</text:span>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13"><text:span text:style-name="T25">階段</text:span></text:p>
            </table:table-cell>
            <table:table-cell table:style-name="表格131.A1" office:value-type="string">
              <text:p text:style-name="P13"><text:span text:style-name="T25">英文</text:span></text:p>
            </table:table-cell>
            <table:table-cell table:style-name="表格131.A1" office:value-type="string">
              <text:p text:style-name="P13"><text:span text:style-name="T25">做什麼</text:span></text:p>
            </table:table-cell>
            <table:table-cell table:style-name="表格131.A1" office:value-type="string">
              <text:p text:style-name="P13"><text:span text:style-name="T25">資安重點</text:span>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15"><text:span text:style-name="T31">① 定義</text:span></text:p>
          </table:table-cell>
          <table:table-cell table:style-name="表格131.A2" office:value-type="string">
            <text:p text:style-name="P15"><text:span text:style-name="T31">Define</text:span></text:p>
          </table:table-cell>
          <table:table-cell table:style-name="表格131.A2" office:value-type="string">
            <text:p text:style-name="P15"><text:span text:style-name="T31">確認需求與範圍</text:span></text:p>
          </table:table-cell>
          <table:table-cell table:style-name="表格131.A2" office:value-type="string">
            <text:p text:style-name="P15"><text:span text:style-name="T31">列出安全需求（需要登入驗證嗎？）</text:span></text:p>
          </table:table-cell>
        </table:table-row>
        <table:table-row table:style-name="表格131.1">
          <table:table-cell table:style-name="表格131.A3" office:value-type="string">
            <text:p text:style-name="P15"><text:span text:style-name="T31">② 設計</text:span></text:p>
          </table:table-cell>
          <table:table-cell table:style-name="表格131.A3" office:value-type="string">
            <text:p text:style-name="P15"><text:span text:style-name="T31">Design</text:span></text:p>
          </table:table-cell>
          <table:table-cell table:style-name="表格131.A3" office:value-type="string">
            <text:p text:style-name="P15"><text:span text:style-name="T31">設計系統架構</text:span></text:p>
          </table:table-cell>
          <table:table-cell table:style-name="表格131.A3" office:value-type="string">
            <text:p text:style-name="P15"><text:span text:style-name="T31">規劃權限控管、密碼加密、防 SQL Injection</text:span></text:p>
          </table:table-cell>
        </table:table-row>
        <table:table-row table:style-name="表格131.1">
          <table:table-cell table:style-name="表格131.A2" office:value-type="string">
            <text:p text:style-name="P15"><text:span text:style-name="T31">③ 開發</text:span></text:p>
          </table:table-cell>
          <table:table-cell table:style-name="表格131.A2" office:value-type="string">
            <text:p text:style-name="P15"><text:span text:style-name="T31">Develop</text:span></text:p>
          </table:table-cell>
          <table:table-cell table:style-name="表格131.A2" office:value-type="string">
            <text:p text:style-name="P15"><text:span text:style-name="T31">工程師寫程式</text:span></text:p>
          </table:table-cell>
          <table:table-cell table:style-name="表格131.A2" office:value-type="string">
            <text:p text:style-name="P15"><text:span text:style-name="T31">遵守安全編碼規範，不寫危險程式碼</text:span></text:p>
          </table:table-cell>
        </table:table-row>
        <table:table-row table:style-name="表格131.1">
          <table:table-cell table:style-name="表格131.A3" office:value-type="string">
            <text:p text:style-name="P15"><text:span text:style-name="T31">④ 測試</text:span></text:p>
          </table:table-cell>
          <table:table-cell table:style-name="表格131.A3" office:value-type="string">
            <text:p text:style-name="P15"><text:span text:style-name="T31">Test</text:span></text:p>
          </table:table-cell>
          <table:table-cell table:style-name="表格131.A3" office:value-type="string">
            <text:p text:style-name="P15"><text:span text:style-name="T31">測試功能與安全</text:span></text:p>
          </table:table-cell>
          <table:table-cell table:style-name="表格131.A3" office:value-type="string">
            <text:p text:style-name="P15"><text:span text:style-name="T31">弱點掃描、滲透測試，找出漏洞</text:span></text:p>
          </table:table-cell>
        </table:table-row>
        <table:table-row table:style-name="表格131.1">
          <table:table-cell table:style-name="表格131.A2" office:value-type="string">
            <text:p text:style-name="P15"><text:span text:style-name="T31">⑤ 上線</text:span></text:p>
          </table:table-cell>
          <table:table-cell table:style-name="表格131.A2" office:value-type="string">
            <text:p text:style-name="P15"><text:span text:style-name="T31">Deploy</text:span></text:p>
          </table:table-cell>
          <table:table-cell table:style-name="表格131.A2" office:value-type="string">
            <text:p text:style-name="P15"><text:span text:style-name="T31">正式發布系統</text:span></text:p>
          </table:table-cell>
          <table:table-cell table:style-name="表格131.A2" office:value-type="string">
            <text:p text:style-name="P15"><text:span text:style-name="T31">確認設定沒疏漏，最小權限原則</text:span></text:p>
          </table:table-cell>
        </table:table-row>
        <table:table-row table:style-name="表格131.1">
          <table:table-cell table:style-name="表格131.A3" office:value-type="string">
            <text:p text:style-name="P15"><text:span text:style-name="T31">⑥ 維護</text:span></text:p>
          </table:table-cell>
          <table:table-cell table:style-name="表格131.A3" office:value-type="string">
            <text:p text:style-name="P15"><text:span text:style-name="T31">Maintain</text:span></text:p>
          </table:table-cell>
          <table:table-cell table:style-name="表格131.A3" office:value-type="string">
            <text:p text:style-name="P15"><text:span text:style-name="T31">持續監控與更新</text:span></text:p>
          </table:table-cell>
          <table:table-cell table:style-name="表格131.A3" office:value-type="string">
            <text:p text:style-name="P15"><text:span text:style-name="T31">定期更新修補，監控異常行為</text:span></text:p>
          </table:table-cell>
        </table:table-row>
        <text:soft-page-break/>
        <table:table-row table:style-name="表格131.1">
          <table:table-cell table:style-name="表格131.A8" table:number-columns-spanned="4" office:value-type="string">
            <text:p text:style-name="P18"><text:span text:style-name="T33">🔑 <text:s/></text:span><text:span text:style-name="T35">SSDLC 核心</text:span></text:p>
            <text:p text:style-name="P19"><text:span text:style-name="T28">核心精神「左移（Shift Left）」——把資安工作從最後一步，往前移到設計和開發階段。越早發現漏洞，修復成本越低。</text:span>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34">▍</text:span><text:span text:style-name="T35"> ISO 27001：用制度管理資安</text:span></text:h>
      <text:p text:style-name="P24"><text:span text:style-name="T28">ISO 27001 是國際公認的資安管理制度標準，建立的制度稱為 ISMS（Information Security Management System，資訊安全管理系統）。重點是：資安不只是買設備，而是建立一套完整的管理制度。</text:span>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13"><text:span text:style-name="T25">四個面向</text:span></text:p>
            </table:table-cell>
            <table:table-cell table:style-name="表格132.A1" office:value-type="string">
              <text:p text:style-name="P13"><text:span text:style-name="T25">管什麼</text:span></text:p>
            </table:table-cell>
            <table:table-cell table:style-name="表格132.A1" office:value-type="string">
              <text:p text:style-name="P13"><text:span text:style-name="T25">例子</text:span>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15"><text:span text:style-name="T31">人（People）</text:span></text:p>
          </table:table-cell>
          <table:table-cell table:style-name="表格132.A2" office:value-type="string">
            <text:p text:style-name="P15"><text:span text:style-name="T31">管理人員的行為與責任</text:span></text:p>
          </table:table-cell>
          <table:table-cell table:style-name="表格132.A2" office:value-type="string">
            <text:p text:style-name="P15"><text:span text:style-name="T31">員工教育訓練、離職員工帳號立即停用、權限最小化</text:span></text:p>
          </table:table-cell>
        </table:table-row>
        <table:table-row table:style-name="表格132.1">
          <table:table-cell table:style-name="表格132.A3" office:value-type="string">
            <text:p text:style-name="P15"><text:span text:style-name="T31">技術（Technology）</text:span></text:p>
          </table:table-cell>
          <table:table-cell table:style-name="表格132.A3" office:value-type="string">
            <text:p text:style-name="P15"><text:span text:style-name="T31">使用適當的安全技術</text:span></text:p>
          </table:table-cell>
          <table:table-cell table:style-name="表格132.A3" office:value-type="string">
            <text:p text:style-name="P15"><text:span text:style-name="T31">防火牆、MFA、資料加密、EDR</text:span></text:p>
          </table:table-cell>
        </table:table-row>
        <table:table-row table:style-name="表格132.1">
          <table:table-cell table:style-name="表格132.A2" office:value-type="string">
            <text:p text:style-name="P15"><text:span text:style-name="T31">組織（Organization）</text:span></text:p>
          </table:table-cell>
          <table:table-cell table:style-name="表格132.A2" office:value-type="string">
            <text:p text:style-name="P15"><text:span text:style-name="T31">建立流程與管理制度</text:span></text:p>
          </table:table-cell>
          <table:table-cell table:style-name="表格132.A2" office:value-type="string">
            <text:p text:style-name="P15"><text:span text:style-name="T31">資安政策、SOP、定期審查、事件通報流程</text:span></text:p>
          </table:table-cell>
        </table:table-row>
        <table:table-row table:style-name="表格132.1">
          <table:table-cell table:style-name="表格132.A3" office:value-type="string">
            <text:p text:style-name="P15"><text:span text:style-name="T31">實體（Physical）</text:span></text:p>
          </table:table-cell>
          <table:table-cell table:style-name="表格132.A3" office:value-type="string">
            <text:p text:style-name="P15"><text:span text:style-name="T31">保護實體環境</text:span></text:p>
          </table:table-cell>
          <table:table-cell table:style-name="表格132.A3" office:value-type="string">
            <text:p text:style-name="P15"><text:span text:style-name="T31">機房門禁、監視器、防止未授權人員進入</text:span>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8"><text:span text:style-name="T33">🌟 <text:s/></text:span><text:span text:style-name="T49">考試必背三句話</text:span></text:p>
            <text:p text:style-name="P19"><text:span text:style-name="T28">1. 資安三階段：事前預防 → 事中偵測 → 事後復原。</text:span></text:p>
            <text:p text:style-name="P20"><text:span text:style-name="T28">2. SSDLC：六階段（Define→Design→Develop→Test→Deploy→Maintain）都加入資安。</text:span></text:p>
            <text:p text:style-name="P20"><text:span text:style-name="T28">3. ISO 27001：用 ISMS 制度管理資安，涵蓋「人、技術、組織、實體」四面向。</text:span></text:p>
          </table:table-cell>
          <table:covered-table-cell/>
          <table:covered-table-cell/>
        </table:table-row>
      </table:table>
      <text:h text:style-name="P2" text:outline-level="2"><text:span text:style-name="T4">伍、進階防禦：EDR · MDR · MITRE ATT&amp;CK · 數位韌性</text:span></text:h>
      <text:p text:style-name="P24"><text:span text:style-name="T28">現代駭客不一定放病毒，而是偷登入帳號偽裝成正常使用者、長期潛伏、利用合法工具發動攻擊。因此資安核心已從「防毒」轉向「持續監控電腦行為，即時偵測並快速應變」。</text:span></text:p>
      <text:h text:style-name="P3" text:outline-level="3"><text:span text:style-name="T34">▍</text:span><text:span text:style-name="T35"> EDR — 自己監控的資安工具</text:span></text:h>
      <text:p text:style-name="P24"><text:span text:style-name="T28">EDR = Endpoint Detection and Response（端點偵測回應）。想像每台電腦旁邊都站著一位保全，全程監視可疑行為。</text:span></text:p>
      <table:table table:name="表格133" table:style-name="表格133">
        <table:table-column table:style-name="表格133.A"/>
        <table:table-column table:style-name="表格133.B"/>
        <table:table-header-rows>
          <table:table-row table:style-name="表格133.1">
            <table:table-cell table:style-name="表格133.A1" office:value-type="string">
              <text:p text:style-name="P12"><text:span text:style-name="T22">三大偵測範圍</text:span></text:p>
            </table:table-cell>
            <table:table-cell table:style-name="表格133.A1" office:value-type="string">
              <text:p text:style-name="P12"><text:span text:style-name="T22">三大回應動作</text:span>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15"><text:span text:style-name="T27">檔案行為：大量加密/修改系統檔案 → 可能勒索病毒｜程式行為：Office 偷偷開命令列 → 明顯異常｜網路行為：突然連線境外 IP → 可能已遭入侵</text:span></text:p>
          </table:table-cell>
          <table:table-cell table:style-name="表格133.A2" office:value-type="string">
            <text:p text:style-name="P15"><text:span text:style-name="T27">中斷程序：立即殺掉可疑惡意程式｜隔離主機：切斷該電腦與內網連線，防擴散｜封鎖連線：禁止與駭客伺服器通訊</text:span>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8"><text:span text:style-name="T33">💡 <text:s/></text:span><text:span text:style-name="T35">核心觀念</text:span></text:p>
            <text:p text:style-name="P19"><text:span text:style-name="T28">EDR 是「買工具、自己守」。企業需要有內部資安人員負責查看警報並處理事件。</text:span></text:p>
          </table:table-cell>
          <table:covered-table-cell/>
        </table:table-row>
      </table:table>
      <text:h text:style-name="P3" text:outline-level="3"><text:span text:style-name="T34">▍</text:span><text:span text:style-name="T35"> MDR — 委外的資安託管服務</text:span></text:h>
      <text:p text:style-name="P24"><text:span text:style-name="T28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span>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13"><text:span text:style-name="T22">比較項目</text:span></text:p>
            </table:table-cell>
            <table:table-cell table:style-name="表格134.A1" office:value-type="string">
              <text:p text:style-name="P13"><text:span text:style-name="T22">EDR</text:span></text:p>
            </table:table-cell>
            <table:table-cell table:style-name="表格134.A1" office:value-type="string">
              <text:p text:style-name="P13"><text:span text:style-name="T22">MDR</text:span>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15"><text:span text:style-name="T27">管理方式</text:span></text:p>
          </table:table-cell>
          <table:table-cell table:style-name="表格134.A2" office:value-type="string">
            <text:p text:style-name="P15"><text:span text:style-name="T27">自行管理</text:span></text:p>
          </table:table-cell>
          <table:table-cell table:style-name="表格134.A2" office:value-type="string">
            <text:p text:style-name="P15"><text:span text:style-name="T27">委外管理</text:span></text:p>
          </table:table-cell>
        </table:table-row>
        <table:table-row table:style-name="表格134.1">
          <table:table-cell table:style-name="表格134.A3" office:value-type="string">
            <text:p text:style-name="P15"><text:span text:style-name="T27">監控時間</text:span></text:p>
          </table:table-cell>
          <table:table-cell table:style-name="表格134.A3" office:value-type="string">
            <text:p text:style-name="P15"><text:span text:style-name="T27">視團隊而定</text:span></text:p>
          </table:table-cell>
          <table:table-cell table:style-name="表格134.A3" office:value-type="string">
            <text:p text:style-name="P15"><text:span text:style-name="T27">24 / 7 全天</text:span></text:p>
          </table:table-cell>
        </table:table-row>
        <table:table-row table:style-name="表格134.1">
          <table:table-cell table:style-name="表格134.A2" office:value-type="string">
            <text:p text:style-name="P15"><text:span text:style-name="T27">所需能力</text:span></text:p>
          </table:table-cell>
          <table:table-cell table:style-name="表格134.A2" office:value-type="string">
            <text:p text:style-name="P15"><text:span text:style-name="T27">需內部資安人員</text:span></text:p>
          </table:table-cell>
          <table:table-cell table:style-name="表格134.A2" office:value-type="string">
            <text:p text:style-name="P15"><text:span text:style-name="T27">無須自建團隊</text:span><text:soft-page-break/></text:p>
          </table:table-cell>
        </table:table-row>
        <table:table-row table:style-name="表格134.1">
          <table:table-cell table:style-name="表格134.A3" office:value-type="string">
            <text:p text:style-name="P15"><text:span text:style-name="T27">適合對象</text:span></text:p>
          </table:table-cell>
          <table:table-cell table:style-name="表格134.A3" office:value-type="string">
            <text:p text:style-name="P15"><text:span text:style-name="T27">大型企業</text:span></text:p>
          </table:table-cell>
          <table:table-cell table:style-name="表格134.A3" office:value-type="string">
            <text:p text:style-name="P15"><text:span text:style-name="T27">中小企業</text:span></text:p>
          </table:table-cell>
        </table:table-row>
        <table:table-row table:style-name="表格134.1">
          <table:table-cell table:style-name="表格134.A2" office:value-type="string">
            <text:p text:style-name="P15"><text:span text:style-name="T27">成本模式</text:span></text:p>
          </table:table-cell>
          <table:table-cell table:style-name="表格134.A2" office:value-type="string">
            <text:p text:style-name="P15"><text:span text:style-name="T27">工具費 + 人力</text:span></text:p>
          </table:table-cell>
          <table:table-cell table:style-name="表格134.A2" office:value-type="string">
            <text:p text:style-name="P15"><text:span text:style-name="T27">月費 / 年費訂閱</text:span></text:p>
          </table:table-cell>
        </table:table-row>
      </table:table>
      <text:h text:style-name="P3" text:outline-level="3"><text:span text:style-name="T34">▍</text:span><text:span text:style-name="T35"> MITRE ATT&amp;CK — 駭客招式大全</text:span></text:h>
      <text:p text:style-name="P24"><text:span text:style-name="T28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span>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13"><text:span text:style-name="T25">TTP</text:span></text:p>
            </table:table-cell>
            <table:table-cell table:style-name="表格135.A1" office:value-type="string">
              <text:p text:style-name="P13"><text:span text:style-name="T25">意義</text:span></text:p>
            </table:table-cell>
            <table:table-cell table:style-name="表格135.A1" office:value-type="string">
              <text:p text:style-name="P13"><text:span text:style-name="T25">ATT&amp;CK 三大用途</text:span>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15"><text:span text:style-name="T31">T - Tactics</text:span></text:p>
          </table:table-cell>
          <table:table-cell table:style-name="表格135.A2" office:value-type="string">
            <text:p text:style-name="P15"><text:span text:style-name="T31">戰術（攻擊目的）</text:span></text:p>
          </table:table-cell>
          <table:table-cell table:style-name="表格135.A2" office:value-type="string">
            <text:p text:style-name="P15"><text:span text:style-name="T31">威脅分析：快速定性事件性質</text:span></text:p>
          </table:table-cell>
        </table:table-row>
        <table:table-row table:style-name="表格135.1">
          <table:table-cell table:style-name="表格135.A3" office:value-type="string">
            <text:p text:style-name="P15"><text:span text:style-name="T31">T - Techniques</text:span></text:p>
          </table:table-cell>
          <table:table-cell table:style-name="表格135.A3" office:value-type="string">
            <text:p text:style-name="P15"><text:span text:style-name="T31">技術（使用方法）</text:span></text:p>
          </table:table-cell>
          <table:table-cell table:style-name="表格135.A3" office:value-type="string">
            <text:p text:style-name="P15"><text:span text:style-name="T31">防禦對應：針對常見手法加強監控</text:span></text:p>
          </table:table-cell>
        </table:table-row>
        <table:table-row table:style-name="表格135.1">
          <table:table-cell table:style-name="表格135.A2" office:value-type="string">
            <text:p text:style-name="P15"><text:span text:style-name="T31">P - Procedures</text:span></text:p>
          </table:table-cell>
          <table:table-cell table:style-name="表格135.A2" office:value-type="string">
            <text:p text:style-name="P15"><text:span text:style-name="T31">流程（實際操作步驟）</text:span></text:p>
          </table:table-cell>
          <table:table-cell table:style-name="表格135.A2" office:value-type="string">
            <text:p text:style-name="P15"><text:span text:style-name="T31">主動防禦：預測下一步，提前部署</text:span>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8"><text:span text:style-name="T33">💡 <text:s/></text:span><text:span text:style-name="T35">核心觀念</text:span></text:p>
            <text:p text:style-name="P19"><text:span text:style-name="T28">ATT&amp;CK 就像「警察研究犯罪手法的教材」——整理成冊，讓所有人都能對照使用。</text:span></text:p>
          </table:table-cell>
          <table:covered-table-cell/>
          <table:covered-table-cell/>
        </table:table-row>
      </table:table>
      <text:h text:style-name="P3" text:outline-level="3"><text:span text:style-name="T34">▍</text:span><text:span text:style-name="T35"> 數位韌性（Digital Resilience）</text:span></text:h>
      <table:table table:name="表格136" table:style-name="表格136">
        <table:table-column table:style-name="表格136.A"/>
        <table:table-column table:style-name="表格136.B"/>
        <table:table-header-rows>
          <table:table-row table:style-name="表格136.1">
            <table:table-cell table:style-name="表格136.A1" office:value-type="string">
              <text:p text:style-name="P12"><text:span text:style-name="T22">❌ 以前的想法</text:span></text:p>
            </table:table-cell>
            <table:table-cell table:style-name="表格136.A1" office:value-type="string">
              <text:p text:style-name="P12"><text:span text:style-name="T22">✅ 現在的思維</text:span>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15"><text:span text:style-name="T27">「不能被攻擊」——重點：阻止所有入侵。</text:span></text:p>
          </table:table-cell>
          <table:table-cell table:style-name="表格136.A2" office:value-type="string">
            <text:p text:style-name="P15"><text:span text:style-name="T27">「被打了還能撐住並快速恢復」——重點：強化復原能力。</text:span></text:p>
          </table:table-cell>
        </table:table-row>
      </table:table>
      <text:p text:style-name="P24"><text:span text:style-name="T20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span>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8"><text:span text:style-name="T33">📝 <text:s/></text:span><text:span text:style-name="T49">一行記憶法</text:span></text:p>
            <text:p text:style-name="P19"><text:span text:style-name="T50">🛡 EDR → </text:span><text:span text:style-name="T28">自己買工具守　</text:span><text:span text:style-name="T50">👥 MDR → </text:span><text:span text:style-name="T28">請公司幫你守</text:span></text:p>
            <text:p text:style-name="P20"><text:span text:style-name="T50">📖 ATT&amp;CK → </text:span><text:span text:style-name="T28">駭客招式教材　</text:span><text:span text:style-name="T50">💪 韌性 → </text:span><text:span text:style-name="T28">撐住、快速復原</text:span></text:p>
          </table:table-cell>
        </table:table-row>
      </table:table>
      <text:h text:style-name="P2" text:outline-level="2"><text:span text:style-name="T4">陸、Zero Trust 零信任安全</text:span>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8"><text:span text:style-name="T33">📋 <text:s/></text:span><text:span text:style-name="T39">內容審查說明</text:span></text:p>
            <text:p text:style-name="P19"><text:span text:style-name="T28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span></text:p>
          </table:table-cell>
        </table:table-row>
      </table:table>
      <text:p text:style-name="P24"><text:span text:style-name="T28">傳統企業網路以「邊界防護」為核心，邊界之內的人員與設備幾乎被預設為可信任（城堡思維）。Zero Trust 則完全相反。</text:span>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13"/>
            </table:table-cell>
            <table:table-cell table:style-name="表格139.A1" office:value-type="string">
              <text:p text:style-name="P13"><text:span text:style-name="T22">傳統（城堡思維）</text:span></text:p>
            </table:table-cell>
            <table:table-cell table:style-name="表格139.A1" office:value-type="string">
              <text:p text:style-name="P13"><text:span text:style-name="T22">Zero Trust</text:span>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15"><text:span text:style-name="T27">核心假設</text:span></text:p>
          </table:table-cell>
          <table:table-cell table:style-name="表格139.A2" office:value-type="string">
            <text:p text:style-name="P15"><text:span text:style-name="T27">內網 = 可信任</text:span></text:p>
          </table:table-cell>
          <table:table-cell table:style-name="表格139.A2" office:value-type="string">
            <text:p text:style-name="P15"><text:span text:style-name="T27">任何人都需持續驗證</text:span></text:p>
          </table:table-cell>
        </table:table-row>
        <table:table-row table:style-name="表格139.1">
          <table:table-cell table:style-name="表格139.A3" office:value-type="string">
            <text:p text:style-name="P15"><text:span text:style-name="T27">防護重點</text:span></text:p>
          </table:table-cell>
          <table:table-cell table:style-name="表格139.A3" office:value-type="string">
            <text:p text:style-name="P15"><text:span text:style-name="T27">網路邊界 / 防火牆</text:span></text:p>
          </table:table-cell>
          <table:table-cell table:style-name="表格139.A3" office:value-type="string">
            <text:p text:style-name="P15"><text:span text:style-name="T27">身份 × 設備 × 情境</text:span></text:p>
          </table:table-cell>
        </table:table-row>
        <table:table-row table:style-name="表格139.1">
          <table:table-cell table:style-name="表格139.A2" office:value-type="string">
            <text:p text:style-name="P15"><text:span text:style-name="T27">登入之後</text:span></text:p>
          </table:table-cell>
          <table:table-cell table:style-name="表格139.A2" office:value-type="string">
            <text:p text:style-name="P15"><text:span text:style-name="T27">幾乎不再驗證</text:span></text:p>
          </table:table-cell>
          <table:table-cell table:style-name="表格139.A2" office:value-type="string">
            <text:p text:style-name="P15"><text:span text:style-name="T27">每個操作持續驗證</text:span></text:p>
          </table:table-cell>
        </table:table-row>
        <table:table-row table:style-name="表格139.1">
          <table:table-cell table:style-name="表格139.A3" office:value-type="string">
            <text:p text:style-name="P15"><text:span text:style-name="T27">駭客入侵後</text:span></text:p>
          </table:table-cell>
          <table:table-cell table:style-name="表格139.A3" office:value-type="string">
            <text:p text:style-name="P15"><text:span text:style-name="T27">可橫向移動整個內網</text:span></text:p>
          </table:table-cell>
          <table:table-cell table:style-name="表格139.A3" office:value-type="string">
            <text:p text:style-name="P15"><text:span text:style-name="T27">被微分段限制，難以擴散</text:span></text:p>
          </table:table-cell>
        </table:table-row>
        <text:soft-page-break/>
        <table:table-row table:style-name="表格139.1">
          <table:table-cell table:style-name="表格139.A2" office:value-type="string">
            <text:p text:style-name="P15"><text:span text:style-name="T27">適合時代</text:span></text:p>
          </table:table-cell>
          <table:table-cell table:style-name="表格139.A2" office:value-type="string">
            <text:p text:style-name="P15"><text:span text:style-name="T27">固定辦公室 / 單一內網</text:span></text:p>
          </table:table-cell>
          <table:table-cell table:style-name="表格139.A2" office:value-type="string">
            <text:p text:style-name="P15"><text:span text:style-name="T27">Cloud / 遠端 / 多設備</text:span>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8"><text:span text:style-name="T33">🔑 <text:s/></text:span><text:span text:style-name="T49">核心一句話</text:span></text:p>
            <text:p text:style-name="P19"><text:span text:style-name="T50">❝ 永不信任，始終驗證 ❞（Never Trust, Always Verify）</text:span></text:p>
            <text:p text:style-name="P20"><text:span text:style-name="T28">無論使用者身處公司內網或外部網路，無論設備是否為公司配發，系統都不會因為「位置」就直接信任，而是透過多重機制持續確認安全性。</text:span></text:p>
          </table:table-cell>
          <table:covered-table-cell/>
          <table:covered-table-cell/>
        </table:table-row>
      </table:table>
      <text:h text:style-name="P3" text:outline-level="3"><text:span text:style-name="T34">▍</text:span><text:span text:style-name="T35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13"><text:span text:style-name="T25">支柱</text:span></text:p>
            </table:table-cell>
            <table:table-cell table:style-name="表格140.A1" office:value-type="string">
              <text:p text:style-name="P13"><text:span text:style-name="T25">口訣</text:span></text:p>
            </table:table-cell>
            <table:table-cell table:style-name="表格140.A1" office:value-type="string">
              <text:p text:style-name="P13"><text:span text:style-name="T25">具體內容</text:span>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15"><text:span text:style-name="T31">🔑 Identity（身份驗證）</text:span></text:p>
          </table:table-cell>
          <table:table-cell table:style-name="表格140.A2" office:value-type="string">
            <text:p text:style-name="P15"><text:span text:style-name="T31">人</text:span></text:p>
          </table:table-cell>
          <table:table-cell table:style-name="表格140.A2" office:value-type="string">
            <text:p text:style-name="P15"><text:span text:style-name="T31">確認使用者是本人：帳密、MFA（手機 OTP、指紋）、IAM 身份與存取管理</text:span></text:p>
          </table:table-cell>
        </table:table-row>
        <table:table-row table:style-name="表格140.1">
          <table:table-cell table:style-name="表格140.A3" office:value-type="string">
            <text:p text:style-name="P15"><text:span text:style-name="T31">💻 Device（設備健康）</text:span></text:p>
          </table:table-cell>
          <table:table-cell table:style-name="表格140.A3" office:value-type="string">
            <text:p text:style-name="P15"><text:span text:style-name="T31">機</text:span></text:p>
          </table:table-cell>
          <table:table-cell table:style-name="表格140.A3" office:value-type="string">
            <text:p text:style-name="P15"><text:span text:style-name="T31">確認設備是否安全：防毒更新、系統版本、是否為授權設備（Device Posture）</text:span></text:p>
          </table:table-cell>
        </table:table-row>
        <table:table-row table:style-name="表格140.1">
          <table:table-cell table:style-name="表格140.A2" office:value-type="string">
            <text:p text:style-name="P15"><text:span text:style-name="T31">🌐 Context（存取情境）</text:span></text:p>
          </table:table-cell>
          <table:table-cell table:style-name="表格140.A2" office:value-type="string">
            <text:p text:style-name="P15"><text:span text:style-name="T31">境</text:span></text:p>
          </table:table-cell>
          <table:table-cell table:style-name="表格140.A2" office:value-type="string">
            <text:p text:style-name="P15"><text:span text:style-name="T31">評估環境是否異常：登入時間、地點、行為模式；凌晨從境外登入會觸發額外驗證</text:span></text:p>
          </table:table-cell>
        </table:table-row>
      </table:table>
      <text:h text:style-name="P3" text:outline-level="3"><text:span text:style-name="T34">▍</text:span><text:span text:style-name="T35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13"><text:span text:style-name="T25">機制</text:span></text:p>
            </table:table-cell>
            <table:table-cell table:style-name="表格141.A1" office:value-type="string">
              <text:p text:style-name="P13"><text:span text:style-name="T25">說明</text:span>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15"><text:span text:style-name="T31">① MFA 多因素驗證</text:span></text:p>
          </table:table-cell>
          <table:table-cell table:style-name="表格141.A2" office:value-type="string">
            <text:p text:style-name="P15"><text:span text:style-name="T31">登入不只密碼，還需第二層驗證（手機驗證碼、指紋、硬體金鑰），密碼外洩也難入侵</text:span></text:p>
          </table:table-cell>
        </table:table-row>
        <table:table-row table:style-name="表格141.1">
          <table:table-cell table:style-name="表格141.A3" office:value-type="string">
            <text:p text:style-name="P15"><text:span text:style-name="T31">② Least Privilege 最小權限</text:span></text:p>
          </table:table-cell>
          <table:table-cell table:style-name="表格141.A3" office:value-type="string">
            <text:p text:style-name="P15"><text:span text:style-name="T31">每位使用者只獲得完成工作所需的最低權限。權限愈小，風險愈低</text:span></text:p>
          </table:table-cell>
        </table:table-row>
        <table:table-row table:style-name="表格141.1">
          <table:table-cell table:style-name="表格141.A2" office:value-type="string">
            <text:p text:style-name="P15"><text:span text:style-name="T31">③ Micro-Segmentation 微分段</text:span></text:p>
          </table:table-cell>
          <table:table-cell table:style-name="表格141.A2" office:value-type="string">
            <text:p text:style-name="P15"><text:span text:style-name="T31">將內網切成多個獨立小區段，各區設存取控制；攻破一段也無法橫向擴散</text:span></text:p>
          </table:table-cell>
        </table:table-row>
        <table:table-row table:style-name="表格141.1">
          <table:table-cell table:style-name="表格141.A3" office:value-type="string">
            <text:p text:style-name="P15"><text:span text:style-name="T31">④ Continuous Monitoring 持續監控</text:span></text:p>
          </table:table-cell>
          <table:table-cell table:style-name="表格141.A3" office:value-type="string">
            <text:p text:style-name="P15"><text:span text:style-name="T31">全天候分析行為，異常立即警示（如半夜大量下載、短時間多國登入、刪大量日誌）</text:span>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8"><text:span text:style-name="T33">🔥 <text:s/></text:span><text:span text:style-name="T35">考前 10 秒超濃縮</text:span></text:p>
            <text:p text:style-name="P19"><text:span text:style-name="T28">ZT 核心：不信任任何人（含內網）；檢查三件事——人（Identity）、機（Device）、境（Context）；搭配四招——MFA ＋ 最小權限 ＋ 微分段 ＋ 持續監控。</text:span></text:p>
            <text:p text:style-name="P20"><text:span text:style-name="T28">口訣：人機境，多驗、少給、切塊、一直看。</text:span></text:p>
          </table:table-cell>
          <table:covered-table-cell/>
        </table:table-row>
      </table:table>
      <text:h text:style-name="P3" text:outline-level="3"><text:span text:style-name="T34">▍</text:span><text:span text:style-name="T35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13"><text:span text:style-name="T25">Step</text:span></text:p>
            </table:table-cell>
            <table:table-cell table:style-name="表格142.A1" office:value-type="string">
              <text:p text:style-name="P13"><text:span text:style-name="T25">動作</text:span>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15"><text:span text:style-name="T31">1 發出存取請求</text:span></text:p>
          </table:table-cell>
          <table:table-cell table:style-name="表格142.A2" office:value-type="string">
            <text:p text:style-name="P15"><text:span text:style-name="T31">使用者或設備嘗試存取某資源（系統 / 檔案 / 資料庫）</text:span></text:p>
          </table:table-cell>
        </table:table-row>
        <table:table-row table:style-name="表格142.1">
          <table:table-cell table:style-name="表格142.A3" office:value-type="string">
            <text:p text:style-name="P15"><text:span text:style-name="T31">2 身份驗證 Identity</text:span></text:p>
          </table:table-cell>
          <table:table-cell table:style-name="表格142.A3" office:value-type="string">
            <text:p text:style-name="P15"><text:span text:style-name="T31">確認身份：帳密 + MFA 驗證通過</text:span></text:p>
          </table:table-cell>
        </table:table-row>
        <table:table-row table:style-name="表格142.1">
          <table:table-cell table:style-name="表格142.A2" office:value-type="string">
            <text:p text:style-name="P15"><text:span text:style-name="T31">3 設備驗證 Device</text:span></text:p>
          </table:table-cell>
          <table:table-cell table:style-name="表格142.A2" office:value-type="string">
            <text:p text:style-name="P15"><text:span text:style-name="T31">檢查設備健康：防毒、更新、合規性符合要求</text:span></text:p>
          </table:table-cell>
        </table:table-row>
        <table:table-row table:style-name="表格142.1">
          <table:table-cell table:style-name="表格142.A3" office:value-type="string">
            <text:p text:style-name="P15"><text:span text:style-name="T31">4 情境評估 Context</text:span></text:p>
          </table:table-cell>
          <table:table-cell table:style-name="表格142.A3" office:value-type="string">
            <text:p text:style-name="P15"><text:span text:style-name="T31">分析存取時間、地點、行為模式，計算風險分數</text:span></text:p>
          </table:table-cell>
        </table:table-row>
        <table:table-row table:style-name="表格142.1">
          <table:table-cell table:style-name="表格142.A2" office:value-type="string">
            <text:p text:style-name="P15"><text:span text:style-name="T31">5 權限比對</text:span></text:p>
          </table:table-cell>
          <table:table-cell table:style-name="表格142.A2" office:value-type="string">
            <text:p text:style-name="P15"><text:span text:style-name="T31">依最小權限原則，確認是否有權存取該資源</text:span></text:p>
          </table:table-cell>
        </table:table-row>
        <table:table-row table:style-name="表格142.1">
          <table:table-cell table:style-name="表格142.A3" office:value-type="string">
            <text:p text:style-name="P15"><text:span text:style-name="T31">6 授權或拒絕</text:span></text:p>
          </table:table-cell>
          <table:table-cell table:style-name="表格142.A3" office:value-type="string">
            <text:p text:style-name="P15"><text:span text:style-name="T31">風險低且權限符合 → 授權；否則 → 要求補充驗證或拒絕</text:span></text:p>
          </table:table-cell>
        </table:table-row>
        <table:table-row table:style-name="表格142.1">
          <table:table-cell table:style-name="表格142.A2" office:value-type="string">
            <text:p text:style-name="P15"><text:span text:style-name="T31">7 持續監控</text:span></text:p>
          </table:table-cell>
          <table:table-cell table:style-name="表格142.A2" office:value-type="string">
            <text:p text:style-name="P15"><text:span text:style-name="T31">授權後全程監控行為，發現異常立即告警或中斷連線</text:span></text:p>
          </table:table-cell>
        </table:table-row>
        <text:soft-page-break/>
        <table:table-row table:style-name="表格142.1">
          <table:table-cell table:style-name="表格142.A9" table:number-columns-spanned="2" office:value-type="string">
            <text:p text:style-name="P18"><text:span text:style-name="T33">⚠️ <text:s/></text:span><text:span text:style-name="T39">公職考試陷阱整理</text:span></text:p>
            <text:p text:style-name="P19"><text:span text:style-name="T29">ZT = 完全不相信員工？　</text:span><text:span text:style-name="T28">✗ 重點是「每次都驗證」，驗證通過員工仍可正常使用，只是不再預設信任。</text:span></text:p>
            <text:p text:style-name="P20"><text:span text:style-name="T29">只有外網才危險？　</text:span><text:span text:style-name="T28">✗ 內網也可能：帳號被盜、設備中毒、內部人員惡意操作，故內網也須驗證。</text:span></text:p>
            <text:p text:style-name="P20"><text:span text:style-name="T29">登入一次後就永久可信？　</text:span><text:span text:style-name="T28">✗ 持續驗證，單次登入不代表長期信任，高風險行為會觸發重新驗證。</text:span></text:p>
            <text:p text:style-name="P20"><text:span text:style-name="T29">Zero Trust 重視網路位置？（超常考）　</text:span><text:span text:style-name="T28">✗ 完全相反！重點從「位置」轉移到「身份 / 設備 / 情境」。</text:span></text:p>
          </table:table-cell>
          <table:covered-table-cell/>
        </table:table-row>
      </table:table>
      <text:h text:style-name="P1" text:outline-level="1"><text:span text:style-name="T23">結語　·　考前最後叮嚀</text:span>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8"><text:span text:style-name="T33">✅ <text:s/></text:span><text:span text:style-name="T35">你已經完成一輪</text:span></text:p>
            <text:p text:style-name="P19"><text:span text:style-name="T28">讀到這裡，你已經把網路概論與資訊安全的核心觀念走過一遍。考前衝刺請回到「第〇篇 考前速記總表」，把口訣與必背表格反覆掃描，建立「看到關鍵字就能反射答案」的直覺。</text:span></text:p>
          </table:table-cell>
        </table:table-row>
        <table:table-row table:style-name="表格143.1">
          <table:table-cell table:style-name="表格143.A2" office:value-type="string">
            <text:p text:style-name="P18"><text:span text:style-name="T33">🎯 <text:s/></text:span><text:span text:style-name="T49">五個高頻拿分重點</text:span></text:p>
            <text:p text:style-name="P19"><text:span text:style-name="T28">① 分層先記責任：應用給人用、傳輸怎麼送、網路走哪條、連結同區網。</text:span></text:p>
            <text:p text:style-name="P20"><text:span text:style-name="T28">② 計算題動手練：VLSM「需求+2→最小 2ⁿ→/(32−n)」、可用主機「2^主機bit −2」。</text:span></text:p>
            <text:p text:style-name="P20"><text:span text:style-name="T28">③ 流程要會串：上網＝DNS→ARP→NAT；TCP＝握手→Slow Start→CA→丟包降速。</text:span></text:p>
            <text:p text:style-name="P20"><text:span text:style-name="T28">④ 易混成對背：FW/WAF/NGFW、IDS/IPS、HIDS/NIDS、SNMP/ICMP、EDR/MDR、RTO/RPO、Recursive/Iterative。</text:span></text:p>
            <text:p text:style-name="P20"><text:span text:style-name="T28">⑤ 陷阱反著記：ARP 找路由器不是 Google、BGP 政策不是距離、WiFi 是 CA 不是 CD、IOC 是事後不是預測、Zero Trust 看身份不看位置。</text:span></text:p>
          </table:table-cell>
        </table:table-row>
      </table:table>
      <text:p text:style-name="P9"><text:span text:style-name="T14">祝　金榜題名　·　一次上岸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網路概論與資訊安全 · 完整整合筆記</text:span></text:p>
      </style:header>
      <style:footer>
        <text:p text:style-name="MP2"><text:span text:style-name="MT1">公職考試衝刺　·　第 </text:span><text:page-number text:select-page="current">4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網路概論與資訊安全 完整整合筆記</dc:title>
    <meta:initial-creator>Claude</meta:initial-creator>
    <dc:creator>Un-named</dc:creator>
    <meta:editing-cycles>1</meta:editing-cycles>
    <meta:creation-date>2026-06-12T00:41:46.189000000</meta:creation-date>
    <dc:date>2026-06-12T00:41:46.189000000</dc:date>
    <meta:document-statistic meta:table-count="143" meta:image-count="0" meta:object-count="0" meta:page-count="51" meta:paragraph-count="2292" meta:word-count="29514" meta:character-count="46547" meta:non-whitespace-character-count="42021"/>
    <meta:generator>MODA_ODF_Application_Tools/3.8.4.2$Windows_X86_64 LibreOffice_project/4fb77107d5af14329e08085efe4fa19b5633383a</meta:generator>
  </office:meta>
</office:document-meta>
</file>