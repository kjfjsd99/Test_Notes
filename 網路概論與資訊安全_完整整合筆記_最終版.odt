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91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92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94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font-weight="bold" fo:background-color="#ffff00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7" style:family="text">
      <style:text-properties fo:font-weight="bold" fo:background-color="#ffd740" loext:char-shading-value="0" style:font-weight-asian="bold" style:font-weight-complex="bold"/>
    </style:style>
    <style:style style:name="T108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1" style:family="text">
      <style:text-properties fo:font-weight="bold" fo:background-color="#18ffff" loext:char-shading-value="0" style:font-weight-asian="bold" style:font-weight-complex="bold"/>
    </style:style>
    <style:style style:name="T11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22" style:family="text">
      <style:text-properties fo:font-weight="bold" fo:background-color="#ffea00" loext:char-shading-value="0" style:font-weight-asian="bold" style:font-weight-complex="bold"/>
    </style:style>
    <style:style style:name="T123" style:family="text">
      <style:text-properties fo:font-weight="bold" fo:background-color="#76ff03" loext:char-shading-value="0" style:font-weight-asian="bold" style:font-weight-complex="bold"/>
    </style:style>
    <style:style style:name="T124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2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6" style:family="text">
      <style:text-properties fo:background-color="#ffd740" loext:char-shading-value="0"/>
    </style:style>
    <style:style style:name="T127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28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134" style:family="text">
      <style:text-properties fo:background-color="#ffff00" loext:char-shading-value="0"/>
    </style:style>
    <style:style style:name="T135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41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4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01">DF=1，不准切</text:span>）→ ② 到某 Router，發現<text:span text:style-name="T102">封包 &gt; 該路段 MTU</text:span> → ③ <text:span text:style-name="T103">Router 不能切，直接丟棄 </text:span>→ ④ <text:span text:style-name="T104">Router 回傳 ICMP「Fragmentation Needed」（含可用 MTU 大小）</text:span>→ ⑤ <text:span text:style-name="T105">送端調整封包大小後</text:span><text:span text:style-name="T106">重送</text:span>。這就是 <text:span text:style-name="T107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01">PMTUD </text:span>＝<text:span text:style-name="T108"> Path MTU Discovery，自動找出</text:span><text:span text:style-name="T109">來源到目的地</text:span><text:span text:style-name="T108">整條路徑中</text:span><text:span text:style-name="T110">最小的 MTU 值</text:span>。<text:span text:style-name="T111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112">TCP 不依賴 IP 層切封包，而是「自己先控制好大小」</text:span>，<text:span text:style-name="T10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13">MSS = MTU − IP Header − TCP Header </text:span><text:span text:style-name="T4">= </text:span><text:span text:style-name="T114">1500 − 20 − 20 = 1460 bytes</text:span><text:span text:style-name="T4">。</text:span><text:span text:style-name="T115">三向交握時雙方各自宣告 MSS，之後每段 ≤ MSS</text:span><text:span text:style-name="T4">，</text:span><text:span text:style-name="T114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116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117">TCP = 主動控制大小（MSS）＋ DF=1 ＋ PMTUD</text:span>，<text:span text:style-name="T118">從源頭就避免 Fragmentation 發生</text:span>。<text:span text:style-name="T119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105">攻擊者利用「接收端重組封包很耗資源」這個特性</text:span>，<text:span text:style-name="T112">刻意製造大量異常 Fragment</text:span>。正常重組流程：收到 Fragment <text:span text:style-name="T120">放入緩衝區 </text:span>→ <text:span text:style-name="T104">等同一 ID 的所有 Fragment 到齊 → 依</text:span><text:span text:style-name="T121"> Offset </text:span><text:span text:style-name="T10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81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81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07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81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22">設定重組 buffer 上限</text:span>避免無限占用記憶體；<text:span text:style-name="T123">丟棄等待過久或異常的 Fragment</text:span>；<text:span text:style-name="T111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2">PMTUD</text:p>
          </table:table-cell>
          <table:table-cell table:style-name="表格55.A2" office:value-type="string">
            <text:p text:style-name="P8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4">TTL</text:p>
          </table:table-cell>
          <table:table-cell table:style-name="表格55.A3" office:value-type="string">
            <text:p text:style-name="P85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105">32 bit</text:span>，約 43 億個 IP，已嚴重不足</text:p>
          </table:table-cell>
          <table:table-cell table:style-name="表格57.A2" office:value-type="string">
            <text:p text:style-name="P23"><text:span text:style-name="T119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01">需 NAT 共用 IP</text:span>，破壞 End-to-End</text:p>
          </table:table-cell>
          <table:table-cell table:style-name="表格57.A3" office:value-type="string">
            <text:p text:style-name="P23"><text:span text:style-name="T107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01">須另裝 VPN</text:span></text:p>
          </table:table-cell>
          <table:table-cell table:style-name="表格57.A2" office:value-type="string">
            <text:p text:style-name="P23"><text:span text:style-name="T124">支援 IPsec</text:span><text:span text:style-name="T107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01">可變長度</text:span>含 Options，Router 效率低</text:p>
          </table:table-cell>
          <table:table-cell table:style-name="表格57.A3" office:value-type="string">
            <text:p text:style-name="P23"><text:span text:style-name="T107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07">Flow Label 欄位</text:span>，<text:span text:style-name="T125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01">Broadcast</text:span>：一次發給所有人，浪費頻寬</text:p>
          </table:table-cell>
          <table:table-cell table:style-name="表格57.A3" office:value-type="string">
            <text:p text:style-name="P23">改用<text:span text:style-name="T107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11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112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126">Dual Stack（雙協定堆疊）</text:span>— 最常用、最推薦</text:p>
            <text:p text:style-name="P12"><text:span text:style-name="T127">裝置同時具備 IPv4 與 IPv6 兩套協定堆疊</text:span>。<text:span text:style-name="T101">DNS A record → 回傳 IPv4；DNS AAAA record → 回傳 IPv6</text:span>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6">②<text:span text:style-name="T126"> Tunneling（隧道技術）</text:span>— 過渡期橋接方案</text:p>
            <text:p text:style-name="P12">中間網路只支援 IPv4，無法直接傳送 IPv6 封包。解法：<text:span text:style-name="T127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7">③ <text:span text:style-name="T126">Translation（NAT64）</text:span>— 協定轉換、互通最後手段</text:p>
            <text:p text:style-name="P12">適用場景：IPv6-only 裝置需與 IPv4-only 裝置直接通訊。<text:span text:style-name="T118">透過轉換閘道器即時將封包表頭轉換為對方格式</text:span>。代表技術：NAT64 + DNS64。<text:span text:style-name="T102">複雜度最高，有額外效能損耗</text:span>。</text:p>
            <text:p text:style-name="P12">示意：IPv6 裝置 → [ NAT64 <text:span text:style-name="T120">轉換閘道</text:span>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<text:span text:style-name="T101">同時會中文 + 英文</text:span>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<text:span text:style-name="T112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<text:span text:style-name="T104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128">IPv4 的困境：整棟公寓共用一個門牌</text:span><text:span text:style-name="T129">（NAT）</text:span><text:span text:style-name="T4">，郵差只送到大門，裡面誰是誰要另外猜；地址快用光還在借號碼。</text:span></text:p>
            <text:p text:style-name="P22"><text:span text:style-name="T116">IPv6 的世界：每個人都有獨立門牌（公開 IP）</text:span><text:span text:style-name="T4">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</text:span><text:span text:style-name="T130">安全（IPsec）</text:span><text:span text:style-name="T4">＋ </text:span><text:span text:style-name="T131">快（固定 Header）</text:span><text:span text:style-name="T4">＋ 自動（SLAAC）＋ 乾淨（無 Broadcast）。</text:span></text:p>
            <text:p text:style-name="P22"><text:span text:style-name="T132">過渡技術</text:span><text:span text:style-name="T48">：</text:span><text:span text:style-name="T4">雙語（</text:span><text:span text:style-name="T114">Dual Stack</text:span><text:span text:style-name="T4">）＋ 偽裝（</text:span><text:span text:style-name="T114">Tunneling</text:span><text:span text:style-name="T4">）＋ 翻譯（</text:span><text:span text:style-name="T114">Translation</text:span><text:span text:style-name="T4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<text:span text:style-name="T133">Header 可變效率低</text:span>／缺 QoS／用 Broadcast 浪費／IP 需手動設定</text:p>
          </table:table-cell>
          <table:table-cell table:style-name="表格60.A3" office:value-type="string">
            <text:p text:style-name="P23">128 bit 近乎無限／不需 NAT 恢復 E2E／<text:span text:style-name="T124">支援 IPsec</text:span>／<text:span text:style-name="T124">固定 40 bytes 轉送快</text:span>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4">IP 位址決定「最終送到哪台電腦」；MAC 位址決定「目前這一跳要交給哪個網路設備」。</text:span></text:p>
            <text:p text:style-name="P12"><text:span text:style-name="T110">資料在網路中「實際傳送」靠 MAC</text:span>，<text:span text:style-name="T119">但我們只知道對方的 IP</text:span>——所以<text:span text:style-name="T125">需要一個轉換機制</text:span>，這就是 ARP 的工作。</text:p>
          </table:table-cell>
        </table:table-row>
      </table:table>
      <text:h text:style-name="P19" text:outline-level="2">一、ARP（Address Resolution Protocol）：<text:span text:style-name="T134">IP → MAC</text:span></text:h>
      <text:p text:style-name="P36">一句話定義：<text:span text:style-name="T107">ARP</text:span> ＝ <text:span text:style-name="T112">用 IP 找 MAC</text:span>，<text:span text:style-name="T105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</text:span><text:span text:style-name="T135">查 ARP Cache（筆記本）</text:span><text:span text:style-name="T34">：</text:span><text:span text:style-name="T4">先查自己的記錄「</text:span><text:span text:style-name="T136">我之前有沒有問過這個 IP？</text:span><text:span text:style-name="T4">」有 → 直接用。</text:span></text:p>
            <text:p text:style-name="P22"><text:span text:style-name="T34">② </text:span><text:span text:style-name="T135">發出 ARP Request（廣播）</text:span><text:span text:style-name="T34">：</text:span><text:span text:style-name="T4">沒記錄 →</text:span><text:span text:style-name="T137"> 對整個區網廣播</text:span><text:span text:style-name="T4">「誰是 192.168.1.5？</text:span><text:span text:style-name="T137">請告訴我你的 MAC！</text:span><text:span text:style-name="T4">」所有機器都收到。</text:span></text:p>
            <text:p text:style-name="P22"><text:span text:style-name="T34">③ </text:span><text:span text:style-name="T135">收到 ARP Reply（單播回應）</text:span><text:span text:style-name="T34">：</text:span><text:span text:style-name="T138">IP 是 192.168.1.5 的機器回應「我是！MAC 是 AA:BB:CC」</text:span><text:span text:style-name="T4">，其餘機器靜默忽略。</text:span></text:p>
            <text:p text:style-name="P22"><text:span text:style-name="T34">④ </text:span><text:span text:style-name="T135">存進 ARP Cache</text:span><text:span text:style-name="T34">：</text:span><text:span text:style-name="T139">把「IP ↔ MAC」對應記下</text:span><text:span text:style-name="T4">，</text:span><text:span text:style-name="T116">下次直接用</text:span><text:span text:style-name="T4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88">ARP Spoofing（ARP 欺騙）</text:p>
          </table:table-cell>
          <table:table-cell table:style-name="表格62.A3" office:value-type="string">
            <text:p text:style-name="P23"><text:span text:style-name="T119">攻擊者</text:span><text:span text:style-name="T140">假冒他人</text:span><text:span text:style-name="T119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79">arp -a</text:p>
          </table:table-cell>
          <table:table-cell table:style-name="表格62.A4" office:value-type="string">
            <text:p text:style-name="P23"><text:span text:style-name="T110">查看本機的 ARP 對應表</text:span>（<text:span text:style-name="T122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9">ping [IP]</text:p>
          </table:table-cell>
          <table:table-cell table:style-name="表格62.A3" office:value-type="string">
            <text:p text:style-name="P23"><text:span text:style-name="T112">觸發 ARP 運作</text:span>，<text:span text:style-name="T105">讓電腦主動查詢對應 MAC</text:span></text:p>
          </table:table-cell>
        </table:table-row>
      </table:table>
      <text:h text:style-name="P19" text:outline-level="2">二、NAT（Network Address Translation）：私網 → 公網</text:h>
      <text:p text:style-name="P36">一句話定義：<text:span text:style-name="T101">NAT</text:span> ＝ <text:span text:style-name="T141">路由器幫你把「私有 IP」改成「公網 IP」</text:span>，讓內部機器能夠上網。<text:span text:style-name="T142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<text:span text:style-name="T125">封包抵達路由器</text:span>，<text:span text:style-name="T105">NAT 把來源 IP 改成公網 IP（220.x.x.x）</text:span><text:span text:style-name="T133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7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85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85">✗ 以為 ARP 是找 Google 的 MAC　→　</text:span><text:span text:style-name="T4">✓ ARP 找的是「路由器」的 MAC！因為 ARP 只能在同一個 LAN 內使用。</text:span></text:p>
            <text:p text:style-name="P22"><text:span text:style-name="T85">✗ 以為封包直接送到 Google　→　</text:span><text:span text:style-name="T4">✓ 封包先送給路由器，路由器再轉到 Internet。</text:span></text:p>
            <text:p text:style-name="P22"><text:span text:style-name="T85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90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90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91">步驟</text:p>
          </table:table-cell>
          <table:table-cell table:style-name="表格84.A2" office:value-type="string">
            <text:p text:style-name="P91">層級</text:p>
          </table:table-cell>
          <table:table-cell table:style-name="表格84.A2" office:value-type="string">
            <text:p text:style-name="P91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7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91">步驟</text:p>
            </table:table-cell>
            <table:table-cell table:style-name="表格94.A1" office:value-type="string">
              <text:p text:style-name="P91">屬性</text:p>
            </table:table-cell>
            <table:table-cell table:style-name="表格94.A1" office:value-type="string">
              <text:p text:style-name="P91">說明</text:p>
            </table:table-cell>
            <table:table-cell table:style-name="表格94.A1" office:value-type="string">
              <text:p text:style-name="P91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43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43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43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91">口訣</text:p>
          </table:table-cell>
          <table:table-cell table:style-name="表格116.A2" office:value-type="string">
            <text:p text:style-name="P91">IOC 類型</text:p>
          </table:table-cell>
          <table:table-cell table:style-name="表格116.A2" office:value-type="string">
            <text:p text:style-name="P91">白話說明</text:p>
          </table:table-cell>
          <table:table-cell table:style-name="表格116.A2" office:value-type="string">
            <text:p text:style-name="P91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91">Step</text:p>
            </table:table-cell>
            <table:table-cell table:style-name="表格122.A1" office:value-type="string">
              <text:p text:style-name="P91">階段</text:p>
            </table:table-cell>
            <table:table-cell table:style-name="表格122.A1" office:value-type="string">
              <text:p text:style-name="P91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90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90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92">題目</text:p>
            </table:table-cell>
            <table:table-cell table:style-name="表格127.A1" office:value-type="string">
              <text:p text:style-name="P92">答案</text:p>
            </table:table-cell>
            <table:table-cell table:style-name="表格127.A1" office:value-type="string">
              <text:p text:style-name="P92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93">Q1 何者負責「過濾進出網路流量」？</text:p>
          </table:table-cell>
          <table:table-cell table:style-name="表格127.A2" office:value-type="string">
            <text:p text:style-name="P93">Firewall</text:p>
          </table:table-cell>
          <table:table-cell table:style-name="表格127.A2" office:value-type="string">
            <text:p text:style-name="P93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93">Q2 IDS 的主要功能為何？</text:p>
          </table:table-cell>
          <table:table-cell table:style-name="表格127.A3" office:value-type="string">
            <text:p text:style-name="P93">偵測並發出警報</text:p>
          </table:table-cell>
          <table:table-cell table:style-name="表格127.A3" office:value-type="string">
            <text:p text:style-name="P93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93">Q3 IPS 與 IDS 最大差別？</text:p>
          </table:table-cell>
          <table:table-cell table:style-name="表格127.A2" office:value-type="string">
            <text:p text:style-name="P93">IPS 會阻擋，IDS 不會</text:p>
          </table:table-cell>
          <table:table-cell table:style-name="表格127.A2" office:value-type="string">
            <text:p text:style-name="P93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93">Q4 何者屬「主機型入侵偵測」？</text:p>
          </table:table-cell>
          <table:table-cell table:style-name="表格127.A3" office:value-type="string">
            <text:p text:style-name="P93">HIDS</text:p>
          </table:table-cell>
          <table:table-cell table:style-name="表格127.A3" office:value-type="string">
            <text:p text:style-name="P93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93">Q5 NIDS 主要監控什麼？</text:p>
          </table:table-cell>
          <table:table-cell table:style-name="表格127.A2" office:value-type="string">
            <text:p text:style-name="P93">網路封包</text:p>
          </table:table-cell>
          <table:table-cell table:style-name="表格127.A2" office:value-type="string">
            <text:p text:style-name="P93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93">Q6 SNMP 的主要用途？</text:p>
          </table:table-cell>
          <table:table-cell table:style-name="表格127.A3" office:value-type="string">
            <text:p text:style-name="P93">管理網路設備</text:p>
          </table:table-cell>
          <table:table-cell table:style-name="表格127.A3" office:value-type="string">
            <text:p text:style-name="P93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93">Q7 ICMP 常用於哪種工具？</text:p>
          </table:table-cell>
          <table:table-cell table:style-name="表格127.A2" office:value-type="string">
            <text:p text:style-name="P93">Ping</text:p>
          </table:table-cell>
          <table:table-cell table:style-name="表格127.A2" office:value-type="string">
            <text:p text:style-name="P93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93">Q8 ICMP 屬 OSI 哪一層？</text:p>
          </table:table-cell>
          <table:table-cell table:style-name="表格127.A3" office:value-type="string">
            <text:p text:style-name="P93">Network Layer</text:p>
          </table:table-cell>
          <table:table-cell table:style-name="表格127.A3" office:value-type="string">
            <text:p text:style-name="P93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93">Q9 何者用 UDP 且屬應用層？</text:p>
          </table:table-cell>
          <table:table-cell table:style-name="表格127.A2" office:value-type="string">
            <text:p text:style-name="P93">SNMP</text:p>
          </table:table-cell>
          <table:table-cell table:style-name="表格127.A2" office:value-type="string">
            <text:p text:style-name="P93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93">Q10 下列何者正確？</text:p>
          </table:table-cell>
          <table:table-cell table:style-name="表格127.A3" office:value-type="string">
            <text:p text:style-name="P93">SNMP 用於設備管理</text:p>
          </table:table-cell>
          <table:table-cell table:style-name="表格127.A3" office:value-type="string">
            <text:p text:style-name="P93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90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7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94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83</meta:editing-cycles>
    <meta:creation-date>2026-06-12T00:41:46.189000000</meta:creation-date>
    <dc:date>2026-06-13T21:42:08.992547400</dc:date>
    <meta:generator>LibreOffice/26.2.3.2$Windows_X86_64 LibreOffice_project/70e089b17412e4cb7773e41413306b17a2328c34</meta:generator>
    <meta:editing-duration>P1DT54M32S</meta:editing-duration>
    <meta:document-statistic meta:table-count="143" meta:image-count="0" meta:object-count="0" meta:page-count="51" meta:paragraph-count="2292" meta:word-count="29599" meta:character-count="46663" meta:non-whitespace-character-count="42120"/>
  </office:meta>
</office:document-meta>
</file>